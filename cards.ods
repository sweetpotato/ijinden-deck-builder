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9.4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474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3.531cm"/>
    </style:style>
    <style:style style:name="ro1" style:family="table-row">
      <style:table-row-properties style:row-height="2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11"/>
        <table:table-column table:style-name="co6" table:default-cell-style-name="Default"/>
        <table:table-column table:style-name="co11" table:default-cell-style-name="ce9"/>
        <table:table-column table:style-name="co6" table:default-cell-style-name="Default"/>
        <table:table-column table:style-name="co12" table:default-cell-style-name="Default"/>
        <table:table-column table:style-name="co13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table:style-name="ce10" office:value-type="string" calcext:value-type="string">
            <text:p>特性</text:p>
          </table:table-cell>
          <table:table-cell table:style-name="ce15" office:value-type="string" calcext:value-type="string">
            <text:p>特性番号</text:p>
          </table:table-cell>
          <table:table-cell table:style-name="ce15" office:value-type="string" calcext:value-type="string">
            <text:p>遺業能力</text:p>
          </table:table-cell>
          <table:table-cell table:style-name="ce15" office:value-type="string" calcext:value-type="string">
            <text:p>遺業能力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JSON.$A$1];[.$C2];[$JSON.$B$1];[.$E2];[$JSON.$C$1];[.$T2];[$JSON.$D$1];[.$G2];[$JSON.$E$1];[.$I2];[$JSON.$F$1];[.$L2];[$JSON.$G$1];[.$K2];[$JSON.$H$1];[.$O2];[$JSON.$I$1];[.$Q2];[$JSON.$J$1];[.$S2];[$JSON.$K$1];[.$A2];[$JSON.$L$1];[.$B2];[$JSON.$M$1])" office:value-type="string" office:string-value="{&quot;id&quot;:&quot;R-1&quot;,&quot;name&quot;:&quot;上杉謙信&quot;,&quot;imageUrl&quot;:&quot;https://one-draw.jp/ijinden/cardlist/R01/card/R_001.png&quot;,&quot;expansion&quot;:10,&quot;type&quot;:1,&quot;level&quot;:6,&quot;color&quot;:1,&quot;term&quot;:0,&quot;trait&quot;:1,&quot;legacy&quot;:0,&quot;orderTable&quot;:1,&quot;orderDeck&quot;:180}," calcext:value-type="string">
            <text:p>{"id":"R-1","name":"上杉謙信","imageUrl":"https://one-draw.jp/ijinden/cardlist/R01/card/R_001.png","expansion":10,"type":1,"level":6,"color":1,"term":0,"trait":1,"legacy":0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3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JSON.$A$1];[.$C3];[$JSON.$B$1];[.$E3];[$JSON.$C$1];[.$T3];[$JSON.$D$1];[.$G3];[$JSON.$E$1];[.$I3];[$JSON.$F$1];[.$L3];[$JSON.$G$1];[.$K3];[$JSON.$H$1];[.$O3];[$JSON.$I$1];[.$Q3];[$JSON.$J$1];[.$S3];[$JSON.$K$1];[.$A3];[$JSON.$L$1];[.$B3];[$JSON.$M$1])" office:value-type="string" office:string-value="{&quot;id&quot;:&quot;R-2&quot;,&quot;name&quot;:&quot;源義経&quot;,&quot;imageUrl&quot;:&quot;https://one-draw.jp/ijinden/cardlist/R01/card/R_002.png&quot;,&quot;expansion&quot;:10,&quot;type&quot;:1,&quot;level&quot;:1,&quot;color&quot;:1,&quot;term&quot;:0,&quot;trait&quot;:1,&quot;legacy&quot;:1,&quot;orderTable&quot;:2,&quot;orderDeck&quot;:1}," calcext:value-type="string">
            <text:p>{"id":"R-2","name":"源義経","imageUrl":"https://one-draw.jp/ijinden/cardlist/R01/card/R_002.png","expansion":10,"type":1,"level":1,"color":1,"term":0,"trait":1,"legacy":1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JSON.$A$1];[.$C4];[$JSON.$B$1];[.$E4];[$JSON.$C$1];[.$T4];[$JSON.$D$1];[.$G4];[$JSON.$E$1];[.$I4];[$JSON.$F$1];[.$L4];[$JSON.$G$1];[.$K4];[$JSON.$H$1];[.$O4];[$JSON.$I$1];[.$Q4];[$JSON.$J$1];[.$S4];[$JSON.$K$1];[.$A4];[$JSON.$L$1];[.$B4];[$JSON.$M$1])" office:value-type="string" office:string-value="{&quot;id&quot;:&quot;R-3&quot;,&quot;name&quot;:&quot;武田勝頼&quot;,&quot;imageUrl&quot;:&quot;https://one-draw.jp/ijinden/cardlist/R01/card/R_003.png&quot;,&quot;expansion&quot;:10,&quot;type&quot;:1,&quot;level&quot;:2,&quot;color&quot;:1,&quot;term&quot;:0,&quot;trait&quot;:1,&quot;legacy&quot;:4,&quot;orderTable&quot;:3,&quot;orderDeck&quot;:24}," calcext:value-type="string">
            <text:p>{"id":"R-3","name":"武田勝頼","imageUrl":"https://one-draw.jp/ijinden/cardlist/R01/card/R_003.png","expansion":10,"type":1,"level":2,"color":1,"term":0,"trait":1,"legacy":4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JSON.$A$1];[.$C5];[$JSON.$B$1];[.$E5];[$JSON.$C$1];[.$T5];[$JSON.$D$1];[.$G5];[$JSON.$E$1];[.$I5];[$JSON.$F$1];[.$L5];[$JSON.$G$1];[.$K5];[$JSON.$H$1];[.$O5];[$JSON.$I$1];[.$Q5];[$JSON.$J$1];[.$S5];[$JSON.$K$1];[.$A5];[$JSON.$L$1];[.$B5];[$JSON.$M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level&quot;:3,&quot;color&quot;:1,&quot;term&quot;:0,&quot;trait&quot;:0,&quot;legacy&quot;:0,&quot;orderTable&quot;:4,&quot;orderDeck&quot;:63}," calcext:value-type="string">
            <text:p>{"id":"R-4","name":"ヴラド・ツェペシュ","imageUrl":"https://one-draw.jp/ijinden/cardlist/R01/card/R_004.png","expansion":10,"type":1,"level":3,"color":1,"term":0,"trait":0,"legacy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6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JSON.$A$1];[.$C6];[$JSON.$B$1];[.$E6];[$JSON.$C$1];[.$T6];[$JSON.$D$1];[.$G6];[$JSON.$E$1];[.$I6];[$JSON.$F$1];[.$L6];[$JSON.$G$1];[.$K6];[$JSON.$H$1];[.$O6];[$JSON.$I$1];[.$Q6];[$JSON.$J$1];[.$S6];[$JSON.$K$1];[.$A6];[$JSON.$L$1];[.$B6];[$JSON.$M$1])" office:value-type="string" office:string-value="{&quot;id&quot;:&quot;R-5&quot;,&quot;name&quot;:&quot;坂上田村麻呂&quot;,&quot;imageUrl&quot;:&quot;https://one-draw.jp/ijinden/cardlist/R01/card/R_005.png&quot;,&quot;expansion&quot;:10,&quot;type&quot;:1,&quot;level&quot;:4,&quot;color&quot;:1,&quot;term&quot;:0,&quot;trait&quot;:1,&quot;legacy&quot;:0,&quot;orderTable&quot;:5,&quot;orderDeck&quot;:106}," calcext:value-type="string">
            <text:p>{"id":"R-5","name":"坂上田村麻呂","imageUrl":"https://one-draw.jp/ijinden/cardlist/R01/card/R_005.png","expansion":10,"type":1,"level":4,"color":1,"term":0,"trait":1,"legacy":0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7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JSON.$A$1];[.$C7];[$JSON.$B$1];[.$E7];[$JSON.$C$1];[.$T7];[$JSON.$D$1];[.$G7];[$JSON.$E$1];[.$I7];[$JSON.$F$1];[.$L7];[$JSON.$G$1];[.$K7];[$JSON.$H$1];[.$O7];[$JSON.$I$1];[.$Q7];[$JSON.$J$1];[.$S7];[$JSON.$K$1];[.$A7];[$JSON.$L$1];[.$B7];[$JSON.$M$1])" office:value-type="string" office:string-value="{&quot;id&quot;:&quot;R-6&quot;,&quot;name&quot;:&quot;楠木正成&quot;,&quot;imageUrl&quot;:&quot;https://one-draw.jp/ijinden/cardlist/R01/card/R_006.png&quot;,&quot;expansion&quot;:10,&quot;type&quot;:1,&quot;level&quot;:5,&quot;color&quot;:1,&quot;term&quot;:0,&quot;trait&quot;:1,&quot;legacy&quot;:0,&quot;orderTable&quot;:6,&quot;orderDeck&quot;:143}," calcext:value-type="string">
            <text:p>{"id":"R-6","name":"楠木正成","imageUrl":"https://one-draw.jp/ijinden/cardlist/R01/card/R_006.png","expansion":10,"type":1,"level":5,"color":1,"term":0,"trait":1,"legacy":0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JSON.$A$1];[.$C8];[$JSON.$B$1];[.$E8];[$JSON.$C$1];[.$T8];[$JSON.$D$1];[.$G8];[$JSON.$E$1];[.$I8];[$JSON.$F$1];[.$L8];[$JSON.$G$1];[.$K8];[$JSON.$H$1];[.$O8];[$JSON.$I$1];[.$Q8];[$JSON.$J$1];[.$S8];[$JSON.$K$1];[.$A8];[$JSON.$L$1];[.$B8];[$JSON.$M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level&quot;:5,&quot;color&quot;:1,&quot;term&quot;:0,&quot;trait&quot;:0,&quot;legacy&quot;:0,&quot;orderTable&quot;:7,&quot;orderDeck&quot;:144}," calcext:value-type="string">
            <text:p>{"id":"R-7","name":"ジェームズ・バトラー・ヒコック","imageUrl":"https://one-draw.jp/ijinden/cardlist/R01/card/R_007.png","expansion":10,"type":1,"level":5,"color":1,"term":0,"trait":0,"legacy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JSON.$A$1];[.$C9];[$JSON.$B$1];[.$E9];[$JSON.$C$1];[.$T9];[$JSON.$D$1];[.$G9];[$JSON.$E$1];[.$I9];[$JSON.$F$1];[.$L9];[$JSON.$G$1];[.$K9];[$JSON.$H$1];[.$O9];[$JSON.$I$1];[.$Q9];[$JSON.$J$1];[.$S9];[$JSON.$K$1];[.$A9];[$JSON.$L$1];[.$B9];[$JSON.$M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level&quot;:6,&quot;color&quot;:1,&quot;term&quot;:0,&quot;trait&quot;:0,&quot;legacy&quot;:0,&quot;orderTable&quot;:8,&quot;orderDeck&quot;:181}," calcext:value-type="string">
            <text:p>{"id":"R-8","name":"アレクサンドロス大王","imageUrl":"https://one-draw.jp/ijinden/cardlist/R01/card/R_008.png","expansion":10,"type":1,"level":6,"color":1,"term":0,"trait":0,"legacy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JSON.$A$1];[.$C10];[$JSON.$B$1];[.$E10];[$JSON.$C$1];[.$T10];[$JSON.$D$1];[.$G10];[$JSON.$E$1];[.$I10];[$JSON.$F$1];[.$L10];[$JSON.$G$1];[.$K10];[$JSON.$H$1];[.$O10];[$JSON.$I$1];[.$Q10];[$JSON.$J$1];[.$S10];[$JSON.$K$1];[.$A10];[$JSON.$L$1];[.$B10];[$JSON.$M$1])" office:value-type="string" office:string-value="{&quot;id&quot;:&quot;R-9&quot;,&quot;name&quot;:&quot;神剣眠る氏社&quot;,&quot;imageUrl&quot;:&quot;https://one-draw.jp/ijinden/cardlist/R01/card/R_009.png&quot;,&quot;expansion&quot;:10,&quot;type&quot;:2,&quot;level&quot;:2,&quot;color&quot;:1,&quot;term&quot;:0,&quot;trait&quot;:0,&quot;legacy&quot;:1,&quot;orderTable&quot;:9,&quot;orderDeck&quot;:239}," calcext:value-type="string">
            <text:p>{"id":"R-9","name":"神剣眠る氏社","imageUrl":"https://one-draw.jp/ijinden/cardlist/R01/card/R_009.png","expansion":10,"type":2,"level":2,"color":1,"term":0,"trait":0,"legacy":1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JSON.$A$1];[.$C11];[$JSON.$B$1];[.$E11];[$JSON.$C$1];[.$T11];[$JSON.$D$1];[.$G11];[$JSON.$E$1];[.$I11];[$JSON.$F$1];[.$L11];[$JSON.$G$1];[.$K11];[$JSON.$H$1];[.$O11];[$JSON.$I$1];[.$Q11];[$JSON.$J$1];[.$S11];[$JSON.$K$1];[.$A11];[$JSON.$L$1];[.$B11];[$JSON.$M$1])" office:value-type="string" office:string-value="{&quot;id&quot;:&quot;R-10&quot;,&quot;name&quot;:&quot;連なる天守閣&quot;,&quot;imageUrl&quot;:&quot;https://one-draw.jp/ijinden/cardlist/R01/card/R_010.png&quot;,&quot;expansion&quot;:10,&quot;type&quot;:2,&quot;level&quot;:3,&quot;color&quot;:1,&quot;term&quot;:0,&quot;trait&quot;:0,&quot;legacy&quot;:1,&quot;orderTable&quot;:10,&quot;orderDeck&quot;:248}," calcext:value-type="string">
            <text:p>{"id":"R-10","name":"連なる天守閣","imageUrl":"https://one-draw.jp/ijinden/cardlist/R01/card/R_010.png","expansion":10,"type":2,"level":3,"color":1,"term":0,"trait":0,"legacy":1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JSON.$A$1];[.$C12];[$JSON.$B$1];[.$E12];[$JSON.$C$1];[.$T12];[$JSON.$D$1];[.$G12];[$JSON.$E$1];[.$I12];[$JSON.$F$1];[.$L12];[$JSON.$G$1];[.$K12];[$JSON.$H$1];[.$O12];[$JSON.$I$1];[.$Q12];[$JSON.$J$1];[.$S12];[$JSON.$K$1];[.$A12];[$JSON.$L$1];[.$B12];[$JSON.$M$1])" office:value-type="string" office:string-value="{&quot;id&quot;:&quot;R-11&quot;,&quot;name&quot;:&quot;ロイヤリティ&quot;,&quot;imageUrl&quot;:&quot;https://one-draw.jp/ijinden/cardlist/R01/card/R_011.png&quot;,&quot;expansion&quot;:10,&quot;type&quot;:3,&quot;level&quot;:3,&quot;color&quot;:1,&quot;term&quot;:0,&quot;trait&quot;:0,&quot;legacy&quot;:2,&quot;orderTable&quot;:11,&quot;orderDeck&quot;:304}," calcext:value-type="string">
            <text:p>{"id":"R-11","name":"ロイヤリティ","imageUrl":"https://one-draw.jp/ijinden/cardlist/R01/card/R_011.png","expansion":10,"type":3,"level":3,"color":1,"term":0,"trait":0,"legacy":2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JSON.$A$1];[.$C13];[$JSON.$B$1];[.$E13];[$JSON.$C$1];[.$T13];[$JSON.$D$1];[.$G13];[$JSON.$E$1];[.$I13];[$JSON.$F$1];[.$L13];[$JSON.$G$1];[.$K13];[$JSON.$H$1];[.$O13];[$JSON.$I$1];[.$Q13];[$JSON.$J$1];[.$S13];[$JSON.$K$1];[.$A13];[$JSON.$L$1];[.$B13];[$JSON.$M$1])" office:value-type="string" office:string-value="{&quot;id&quot;:&quot;R-12&quot;,&quot;name&quot;:&quot;デスペラード&quot;,&quot;imageUrl&quot;:&quot;https://one-draw.jp/ijinden/cardlist/R01/card/R_012.png&quot;,&quot;expansion&quot;:10,&quot;type&quot;:3,&quot;level&quot;:3,&quot;color&quot;:1,&quot;term&quot;:0,&quot;trait&quot;:0,&quot;legacy&quot;:2,&quot;orderTable&quot;:12,&quot;orderDeck&quot;:305}," calcext:value-type="string">
            <text:p>{"id":"R-12","name":"デスペラード","imageUrl":"https://one-draw.jp/ijinden/cardlist/R01/card/R_012.png","expansion":10,"type":3,"level":3,"color":1,"term":0,"trait":0,"legacy":2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4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JSON.$A$1];[.$C14];[$JSON.$B$1];[.$E14];[$JSON.$C$1];[.$T14];[$JSON.$D$1];[.$G14];[$JSON.$E$1];[.$I14];[$JSON.$F$1];[.$L14];[$JSON.$G$1];[.$K14];[$JSON.$H$1];[.$O14];[$JSON.$I$1];[.$Q14];[$JSON.$J$1];[.$S14];[$JSON.$K$1];[.$A14];[$JSON.$L$1];[.$B14];[$JSON.$M$1])" office:value-type="string" office:string-value="{&quot;id&quot;:&quot;R-13&quot;,&quot;name&quot;:&quot;レッドストーン&quot;,&quot;imageUrl&quot;:&quot;https://one-draw.jp/ijinden/cardlist/R01/card/R_013.png&quot;,&quot;expansion&quot;:10,&quot;type&quot;:4,&quot;level&quot;:1,&quot;color&quot;:1,&quot;term&quot;:0,&quot;trait&quot;:0,&quot;legacy&quot;:3,&quot;orderTable&quot;:13,&quot;orderDeck&quot;:343}," calcext:value-type="string">
            <text:p>{"id":"R-13","name":"レッドストーン","imageUrl":"https://one-draw.jp/ijinden/cardlist/R01/card/R_013.png","expansion":10,"type":4,"level":1,"color":1,"term":0,"trait":0,"legacy":3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5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JSON.$A$1];[.$C15];[$JSON.$B$1];[.$E15];[$JSON.$C$1];[.$T15];[$JSON.$D$1];[.$G15];[$JSON.$E$1];[.$I15];[$JSON.$F$1];[.$L15];[$JSON.$G$1];[.$K15];[$JSON.$H$1];[.$O15];[$JSON.$I$1];[.$Q15];[$JSON.$J$1];[.$S15];[$JSON.$K$1];[.$A15];[$JSON.$L$1];[.$B15];[$JSON.$M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level&quot;:6,&quot;color&quot;:2,&quot;term&quot;:0,&quot;trait&quot;:2,&quot;legacy&quot;:0,&quot;orderTable&quot;:14,&quot;orderDeck&quot;:186}," calcext:value-type="string">
            <text:p>{"id":"B-1","name":"レオナルド・ダ・ヴィンチ","imageUrl":"https://one-draw.jp/ijinden/cardlist/B01/card/B_001.png","expansion":11,"type":1,"level":6,"color":2,"term":0,"trait":2,"legacy":0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JSON.$A$1];[.$C16];[$JSON.$B$1];[.$E16];[$JSON.$C$1];[.$T16];[$JSON.$D$1];[.$G16];[$JSON.$E$1];[.$I16];[$JSON.$F$1];[.$L16];[$JSON.$G$1];[.$K16];[$JSON.$H$1];[.$O16];[$JSON.$I$1];[.$Q16];[$JSON.$J$1];[.$S16];[$JSON.$K$1];[.$A16];[$JSON.$L$1];[.$B16];[$JSON.$M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level&quot;:1,&quot;color&quot;:2,&quot;term&quot;:1,&quot;trait&quot;:0,&quot;legacy&quot;:4,&quot;orderTable&quot;:15,&quot;orderDeck&quot;:6}," calcext:value-type="string">
            <text:p>{"id":"B-2","name":"ヴァスコ・ダ・ガマ","imageUrl":"https://one-draw.jp/ijinden/cardlist/B01/card/B_002.png","expansion":11,"type":1,"level":1,"color":2,"term":1,"trait":0,"legacy":4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JSON.$A$1];[.$C17];[$JSON.$B$1];[.$E17];[$JSON.$C$1];[.$T17];[$JSON.$D$1];[.$G17];[$JSON.$E$1];[.$I17];[$JSON.$F$1];[.$L17];[$JSON.$G$1];[.$K17];[$JSON.$H$1];[.$O17];[$JSON.$I$1];[.$Q17];[$JSON.$J$1];[.$S17];[$JSON.$K$1];[.$A17];[$JSON.$L$1];[.$B17];[$JSON.$M$1])" office:value-type="string" office:string-value="{&quot;id&quot;:&quot;B-3&quot;,&quot;name&quot;:&quot;好太王&quot;,&quot;imageUrl&quot;:&quot;https://one-draw.jp/ijinden/cardlist/B01/card/B_003.png&quot;,&quot;expansion&quot;:11,&quot;type&quot;:1,&quot;level&quot;:2,&quot;color&quot;:2,&quot;term&quot;:0,&quot;trait&quot;:0,&quot;legacy&quot;:4,&quot;orderTable&quot;:16,&quot;orderDeck&quot;:32}," calcext:value-type="string">
            <text:p>{"id":"B-3","name":"好太王","imageUrl":"https://one-draw.jp/ijinden/cardlist/B01/card/B_003.png","expansion":11,"type":1,"level":2,"color":2,"term":0,"trait":0,"legacy":4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JSON.$A$1];[.$C18];[$JSON.$B$1];[.$E18];[$JSON.$C$1];[.$T18];[$JSON.$D$1];[.$G18];[$JSON.$E$1];[.$I18];[$JSON.$F$1];[.$L18];[$JSON.$G$1];[.$K18];[$JSON.$H$1];[.$O18];[$JSON.$I$1];[.$Q18];[$JSON.$J$1];[.$S18];[$JSON.$K$1];[.$A18];[$JSON.$L$1];[.$B18];[$JSON.$M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level&quot;:3,&quot;color&quot;:2,&quot;term&quot;:1,&quot;trait&quot;:0,&quot;legacy&quot;:0,&quot;orderTable&quot;:17,&quot;orderDeck&quot;:74}," calcext:value-type="string">
            <text:p>{"id":"B-4","name":"フェルディナンド・マゼラン","imageUrl":"https://one-draw.jp/ijinden/cardlist/B01/card/B_004.png","expansion":11,"type":1,"level":3,"color":2,"term":1,"trait":0,"legacy":0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9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JSON.$A$1];[.$C19];[$JSON.$B$1];[.$E19];[$JSON.$C$1];[.$T19];[$JSON.$D$1];[.$G19];[$JSON.$E$1];[.$I19];[$JSON.$F$1];[.$L19];[$JSON.$G$1];[.$K19];[$JSON.$H$1];[.$O19];[$JSON.$I$1];[.$Q19];[$JSON.$J$1];[.$S19];[$JSON.$K$1];[.$A19];[$JSON.$L$1];[.$B19];[$JSON.$M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level&quot;:3,&quot;color&quot;:2,&quot;term&quot;:0,&quot;trait&quot;:2,&quot;legacy&quot;:0,&quot;orderTable&quot;:18,&quot;orderDeck&quot;:75}," calcext:value-type="string">
            <text:p>{"id":"B-5","name":"ラファエロ・サンティ","imageUrl":"https://one-draw.jp/ijinden/cardlist/B01/card/B_005.png","expansion":11,"type":1,"level":3,"color":2,"term":0,"trait":2,"legacy":0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JSON.$A$1];[.$C20];[$JSON.$B$1];[.$E20];[$JSON.$C$1];[.$T20];[$JSON.$D$1];[.$G20];[$JSON.$E$1];[.$I20];[$JSON.$F$1];[.$L20];[$JSON.$G$1];[.$K20];[$JSON.$H$1];[.$O20];[$JSON.$I$1];[.$Q20];[$JSON.$J$1];[.$S20];[$JSON.$K$1];[.$A20];[$JSON.$L$1];[.$B20];[$JSON.$M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level&quot;:2,&quot;color&quot;:2,&quot;term&quot;:0,&quot;trait&quot;:0,&quot;legacy&quot;:4,&quot;orderTable&quot;:19,&quot;orderDeck&quot;:33}," calcext:value-type="string">
            <text:p>{"id":"B-6","name":"ジャン・カルヴァン","imageUrl":"https://one-draw.jp/ijinden/cardlist/B01/card/B_006.png","expansion":11,"type":1,"level":2,"color":2,"term":0,"trait":0,"legacy":4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JSON.$A$1];[.$C21];[$JSON.$B$1];[.$E21];[$JSON.$C$1];[.$T21];[$JSON.$D$1];[.$G21];[$JSON.$E$1];[.$I21];[$JSON.$F$1];[.$L21];[$JSON.$G$1];[.$K21];[$JSON.$H$1];[.$O21];[$JSON.$I$1];[.$Q21];[$JSON.$J$1];[.$S21];[$JSON.$K$1];[.$A21];[$JSON.$L$1];[.$B21];[$JSON.$M$1])" office:value-type="string" office:string-value="{&quot;id&quot;:&quot;B-7&quot;,&quot;name&quot;:&quot;武帝&quot;,&quot;imageUrl&quot;:&quot;https://one-draw.jp/ijinden/cardlist/B01/card/B_007.png&quot;,&quot;expansion&quot;:11,&quot;type&quot;:1,&quot;level&quot;:3,&quot;color&quot;:2,&quot;term&quot;:0,&quot;trait&quot;:0,&quot;legacy&quot;:0,&quot;orderTable&quot;:20,&quot;orderDeck&quot;:76}," calcext:value-type="string">
            <text:p>{"id":"B-7","name":"武帝","imageUrl":"https://one-draw.jp/ijinden/cardlist/B01/card/B_007.png","expansion":11,"type":1,"level":3,"color":2,"term":0,"trait":0,"legacy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JSON.$A$1];[.$C22];[$JSON.$B$1];[.$E22];[$JSON.$C$1];[.$T22];[$JSON.$D$1];[.$G22];[$JSON.$E$1];[.$I22];[$JSON.$F$1];[.$L22];[$JSON.$G$1];[.$K22];[$JSON.$H$1];[.$O22];[$JSON.$I$1];[.$Q22];[$JSON.$J$1];[.$S22];[$JSON.$K$1];[.$A22];[$JSON.$L$1];[.$B22];[$JSON.$M$1])" office:value-type="string" office:string-value="{&quot;id&quot;:&quot;B-8&quot;,&quot;name&quot;:&quot;楊貴妃&quot;,&quot;imageUrl&quot;:&quot;https://one-draw.jp/ijinden/cardlist/B01/card/B_008.png&quot;,&quot;expansion&quot;:11,&quot;type&quot;:1,&quot;level&quot;:5,&quot;color&quot;:2,&quot;term&quot;:0,&quot;trait&quot;:0,&quot;legacy&quot;:0,&quot;orderTable&quot;:21,&quot;orderDeck&quot;:154}," calcext:value-type="string">
            <text:p>{"id":"B-8","name":"楊貴妃","imageUrl":"https://one-draw.jp/ijinden/cardlist/B01/card/B_008.png","expansion":11,"type":1,"level":5,"color":2,"term":0,"trait":0,"legacy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JSON.$A$1];[.$C23];[$JSON.$B$1];[.$E23];[$JSON.$C$1];[.$T23];[$JSON.$D$1];[.$G23];[$JSON.$E$1];[.$I23];[$JSON.$F$1];[.$L23];[$JSON.$G$1];[.$K23];[$JSON.$H$1];[.$O23];[$JSON.$I$1];[.$Q23];[$JSON.$J$1];[.$S23];[$JSON.$K$1];[.$A23];[$JSON.$L$1];[.$B23];[$JSON.$M$1])" office:value-type="string" office:string-value="{&quot;id&quot;:&quot;B-9&quot;,&quot;name&quot;:&quot;モナ・リザ&quot;,&quot;imageUrl&quot;:&quot;https://one-draw.jp/ijinden/cardlist/B01/card/B_009.png&quot;,&quot;expansion&quot;:11,&quot;type&quot;:2,&quot;level&quot;:2,&quot;color&quot;:2,&quot;term&quot;:0,&quot;trait&quot;:2,&quot;legacy&quot;:5,&quot;orderTable&quot;:22,&quot;orderDeck&quot;:242}," calcext:value-type="string">
            <text:p>{"id":"B-9","name":"モナ・リザ","imageUrl":"https://one-draw.jp/ijinden/cardlist/B01/card/B_009.png","expansion":11,"type":2,"level":2,"color":2,"term":0,"trait":2,"legacy":5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JSON.$A$1];[.$C24];[$JSON.$B$1];[.$E24];[$JSON.$C$1];[.$T24];[$JSON.$D$1];[.$G24];[$JSON.$E$1];[.$I24];[$JSON.$F$1];[.$L24];[$JSON.$G$1];[.$K24];[$JSON.$H$1];[.$O24];[$JSON.$I$1];[.$Q24];[$JSON.$J$1];[.$S24];[$JSON.$K$1];[.$A24];[$JSON.$L$1];[.$B24];[$JSON.$M$1])" office:value-type="string" office:string-value="{&quot;id&quot;:&quot;B-10&quot;,&quot;name&quot;:&quot;革命の広場&quot;,&quot;imageUrl&quot;:&quot;https://one-draw.jp/ijinden/cardlist/B01/card/B_010.png&quot;,&quot;expansion&quot;:11,&quot;type&quot;:2,&quot;level&quot;:3,&quot;color&quot;:2,&quot;term&quot;:0,&quot;trait&quot;:0,&quot;legacy&quot;:5,&quot;orderTable&quot;:23,&quot;orderDeck&quot;:251}," calcext:value-type="string">
            <text:p>{"id":"B-10","name":"革命の広場","imageUrl":"https://one-draw.jp/ijinden/cardlist/B01/card/B_010.png","expansion":11,"type":2,"level":3,"color":2,"term":0,"trait":0,"legacy":5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JSON.$A$1];[.$C25];[$JSON.$B$1];[.$E25];[$JSON.$C$1];[.$T25];[$JSON.$D$1];[.$G25];[$JSON.$E$1];[.$I25];[$JSON.$F$1];[.$L25];[$JSON.$G$1];[.$K25];[$JSON.$H$1];[.$O25];[$JSON.$I$1];[.$Q25];[$JSON.$J$1];[.$S25];[$JSON.$K$1];[.$A25];[$JSON.$L$1];[.$B25];[$JSON.$M$1])" office:value-type="string" office:string-value="{&quot;id&quot;:&quot;B-11&quot;,&quot;name&quot;:&quot;フリート&quot;,&quot;imageUrl&quot;:&quot;https://one-draw.jp/ijinden/cardlist/B01/card/B_011.png&quot;,&quot;expansion&quot;:11,&quot;type&quot;:3,&quot;level&quot;:3,&quot;color&quot;:2,&quot;term&quot;:0,&quot;trait&quot;:0,&quot;legacy&quot;:0,&quot;orderTable&quot;:24,&quot;orderDeck&quot;:307}," calcext:value-type="string">
            <text:p>{"id":"B-11","name":"フリート","imageUrl":"https://one-draw.jp/ijinden/cardlist/B01/card/B_011.png","expansion":11,"type":3,"level":3,"color":2,"term":0,"trait":0,"legacy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JSON.$A$1];[.$C26];[$JSON.$B$1];[.$E26];[$JSON.$C$1];[.$T26];[$JSON.$D$1];[.$G26];[$JSON.$E$1];[.$I26];[$JSON.$F$1];[.$L26];[$JSON.$G$1];[.$K26];[$JSON.$H$1];[.$O26];[$JSON.$I$1];[.$Q26];[$JSON.$J$1];[.$S26];[$JSON.$K$1];[.$A26];[$JSON.$L$1];[.$B26];[$JSON.$M$1])" office:value-type="string" office:string-value="{&quot;id&quot;:&quot;B-12&quot;,&quot;name&quot;:&quot;ドローイング&quot;,&quot;imageUrl&quot;:&quot;https://one-draw.jp/ijinden/cardlist/B01/card/B_012.png&quot;,&quot;expansion&quot;:11,&quot;type&quot;:3,&quot;level&quot;:3,&quot;color&quot;:2,&quot;term&quot;:0,&quot;trait&quot;:0,&quot;legacy&quot;:2,&quot;orderTable&quot;:25,&quot;orderDeck&quot;:308}," calcext:value-type="string">
            <text:p>{"id":"B-12","name":"ドローイング","imageUrl":"https://one-draw.jp/ijinden/cardlist/B01/card/B_012.png","expansion":11,"type":3,"level":3,"color":2,"term":0,"trait":0,"legacy":2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JSON.$A$1];[.$C27];[$JSON.$B$1];[.$E27];[$JSON.$C$1];[.$T27];[$JSON.$D$1];[.$G27];[$JSON.$E$1];[.$I27];[$JSON.$F$1];[.$L27];[$JSON.$G$1];[.$K27];[$JSON.$H$1];[.$O27];[$JSON.$I$1];[.$Q27];[$JSON.$J$1];[.$S27];[$JSON.$K$1];[.$A27];[$JSON.$L$1];[.$B27];[$JSON.$M$1])" office:value-type="string" office:string-value="{&quot;id&quot;:&quot;B-13&quot;,&quot;name&quot;:&quot;ブルーストーン&quot;,&quot;imageUrl&quot;:&quot;https://one-draw.jp/ijinden/cardlist/B01/card/B_013.png&quot;,&quot;expansion&quot;:11,&quot;type&quot;:4,&quot;level&quot;:1,&quot;color&quot;:2,&quot;term&quot;:0,&quot;trait&quot;:0,&quot;legacy&quot;:3,&quot;orderTable&quot;:26,&quot;orderDeck&quot;:349}," calcext:value-type="string">
            <text:p>{"id":"B-13","name":"ブルーストーン","imageUrl":"https://one-draw.jp/ijinden/cardlist/B01/card/B_013.png","expansion":11,"type":4,"level":1,"color":2,"term":0,"trait":0,"legacy":3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JSON.$A$1];[.$C28];[$JSON.$B$1];[.$E28];[$JSON.$C$1];[.$T28];[$JSON.$D$1];[.$G28];[$JSON.$E$1];[.$I28];[$JSON.$F$1];[.$L28];[$JSON.$G$1];[.$K28];[$JSON.$H$1];[.$O28];[$JSON.$I$1];[.$Q28];[$JSON.$J$1];[.$S28];[$JSON.$K$1];[.$A28];[$JSON.$L$1];[.$B28];[$JSON.$M$1])" office:value-type="string" office:string-value="{&quot;id&quot;:&quot;G-1&quot;,&quot;name&quot;:&quot;出雲の阿国&quot;,&quot;imageUrl&quot;:&quot;https://one-draw.jp/ijinden/cardlist/G01/card/G_001.png&quot;,&quot;expansion&quot;:12,&quot;type&quot;:1,&quot;level&quot;:5,&quot;color&quot;:4,&quot;term&quot;:0,&quot;trait&quot;:0,&quot;legacy&quot;:4,&quot;orderTable&quot;:27,&quot;orderDeck&quot;:163}," calcext:value-type="string">
            <text:p>{"id":"G-1","name":"出雲の阿国","imageUrl":"https://one-draw.jp/ijinden/cardlist/G01/card/G_001.png","expansion":12,"type":1,"level":5,"color":4,"term":0,"trait":0,"legacy":4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JSON.$A$1];[.$C29];[$JSON.$B$1];[.$E29];[$JSON.$C$1];[.$T29];[$JSON.$D$1];[.$G29];[$JSON.$E$1];[.$I29];[$JSON.$F$1];[.$L29];[$JSON.$G$1];[.$K29];[$JSON.$H$1];[.$O29];[$JSON.$I$1];[.$Q29];[$JSON.$J$1];[.$S29];[$JSON.$K$1];[.$A29];[$JSON.$L$1];[.$B29];[$JSON.$M$1])" office:value-type="string" office:string-value="{&quot;id&quot;:&quot;G-2&quot;,&quot;name&quot;:&quot;卑弥呼&quot;,&quot;imageUrl&quot;:&quot;https://one-draw.jp/ijinden/cardlist/G01/card/G_002.png&quot;,&quot;expansion&quot;:12,&quot;type&quot;:1,&quot;level&quot;:1,&quot;color&quot;:4,&quot;term&quot;:0,&quot;trait&quot;:0,&quot;legacy&quot;:0,&quot;orderTable&quot;:28,&quot;orderDeck&quot;:12}," calcext:value-type="string">
            <text:p>{"id":"G-2","name":"卑弥呼","imageUrl":"https://one-draw.jp/ijinden/cardlist/G01/card/G_002.png","expansion":12,"type":1,"level":1,"color":4,"term":0,"trait":0,"legacy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JSON.$A$1];[.$C30];[$JSON.$B$1];[.$E30];[$JSON.$C$1];[.$T30];[$JSON.$D$1];[.$G30];[$JSON.$E$1];[.$I30];[$JSON.$F$1];[.$L30];[$JSON.$G$1];[.$K30];[$JSON.$H$1];[.$O30];[$JSON.$I$1];[.$Q30];[$JSON.$J$1];[.$S30];[$JSON.$K$1];[.$A30];[$JSON.$L$1];[.$B30];[$JSON.$M$1])" office:value-type="string" office:string-value="{&quot;id&quot;:&quot;G-3&quot;,&quot;name&quot;:&quot;アテルイ&quot;,&quot;imageUrl&quot;:&quot;https://one-draw.jp/ijinden/cardlist/G01/card/G_003.png&quot;,&quot;expansion&quot;:12,&quot;type&quot;:1,&quot;level&quot;:3,&quot;color&quot;:4,&quot;term&quot;:0,&quot;trait&quot;:0,&quot;legacy&quot;:4,&quot;orderTable&quot;:29,&quot;orderDeck&quot;:84}," calcext:value-type="string">
            <text:p>{"id":"G-3","name":"アテルイ","imageUrl":"https://one-draw.jp/ijinden/cardlist/G01/card/G_003.png","expansion":12,"type":1,"level":3,"color":4,"term":0,"trait":0,"legacy":4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JSON.$A$1];[.$C31];[$JSON.$B$1];[.$E31];[$JSON.$C$1];[.$T31];[$JSON.$D$1];[.$G31];[$JSON.$E$1];[.$I31];[$JSON.$F$1];[.$L31];[$JSON.$G$1];[.$K31];[$JSON.$H$1];[.$O31];[$JSON.$I$1];[.$Q31];[$JSON.$J$1];[.$S31];[$JSON.$K$1];[.$A31];[$JSON.$L$1];[.$B31];[$JSON.$M$1])" office:value-type="string" office:string-value="{&quot;id&quot;:&quot;G-4&quot;,&quot;name&quot;:&quot;紀貫之&quot;,&quot;imageUrl&quot;:&quot;https://one-draw.jp/ijinden/cardlist/G01/card/G_004.png&quot;,&quot;expansion&quot;:12,&quot;type&quot;:1,&quot;level&quot;:2,&quot;color&quot;:4,&quot;term&quot;:2,&quot;trait&quot;:0,&quot;legacy&quot;:4,&quot;orderTable&quot;:30,&quot;orderDeck&quot;:44}," calcext:value-type="string">
            <text:p>{"id":"G-4","name":"紀貫之","imageUrl":"https://one-draw.jp/ijinden/cardlist/G01/card/G_004.png","expansion":12,"type":1,"level":2,"color":4,"term":2,"trait":0,"legacy":4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JSON.$A$1];[.$C32];[$JSON.$B$1];[.$E32];[$JSON.$C$1];[.$T32];[$JSON.$D$1];[.$G32];[$JSON.$E$1];[.$I32];[$JSON.$F$1];[.$L32];[$JSON.$G$1];[.$K32];[$JSON.$H$1];[.$O32];[$JSON.$I$1];[.$Q32];[$JSON.$J$1];[.$S32];[$JSON.$K$1];[.$A32];[$JSON.$L$1];[.$B32];[$JSON.$M$1])" office:value-type="string" office:string-value="{&quot;id&quot;:&quot;G-5&quot;,&quot;name&quot;:&quot;阿倍仲麻呂&quot;,&quot;imageUrl&quot;:&quot;https://one-draw.jp/ijinden/cardlist/G01/card/G_005.png&quot;,&quot;expansion&quot;:12,&quot;type&quot;:1,&quot;level&quot;:4,&quot;color&quot;:4,&quot;term&quot;:0,&quot;trait&quot;:0,&quot;legacy&quot;:0,&quot;orderTable&quot;:31,&quot;orderDeck&quot;:123}," calcext:value-type="string">
            <text:p>{"id":"G-5","name":"阿倍仲麻呂","imageUrl":"https://one-draw.jp/ijinden/cardlist/G01/card/G_005.png","expansion":12,"type":1,"level":4,"color":4,"term":0,"trait":0,"legacy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JSON.$A$1];[.$C33];[$JSON.$B$1];[.$E33];[$JSON.$C$1];[.$T33];[$JSON.$D$1];[.$G33];[$JSON.$E$1];[.$I33];[$JSON.$F$1];[.$L33];[$JSON.$G$1];[.$K33];[$JSON.$H$1];[.$O33];[$JSON.$I$1];[.$Q33];[$JSON.$J$1];[.$S33];[$JSON.$K$1];[.$A33];[$JSON.$L$1];[.$B33];[$JSON.$M$1])" office:value-type="string" office:string-value="{&quot;id&quot;:&quot;G-6&quot;,&quot;name&quot;:&quot;葛飾北斎&quot;,&quot;imageUrl&quot;:&quot;https://one-draw.jp/ijinden/cardlist/G01/card/G_006.png&quot;,&quot;expansion&quot;:12,&quot;type&quot;:1,&quot;level&quot;:3,&quot;color&quot;:4,&quot;term&quot;:0,&quot;trait&quot;:2,&quot;legacy&quot;:4,&quot;orderTable&quot;:32,&quot;orderDeck&quot;:85}," calcext:value-type="string">
            <text:p>{"id":"G-6","name":"葛飾北斎","imageUrl":"https://one-draw.jp/ijinden/cardlist/G01/card/G_006.png","expansion":12,"type":1,"level":3,"color":4,"term":0,"trait":2,"legacy":4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JSON.$A$1];[.$C34];[$JSON.$B$1];[.$E34];[$JSON.$C$1];[.$T34];[$JSON.$D$1];[.$G34];[$JSON.$E$1];[.$I34];[$JSON.$F$1];[.$L34];[$JSON.$G$1];[.$K34];[$JSON.$H$1];[.$O34];[$JSON.$I$1];[.$Q34];[$JSON.$J$1];[.$S34];[$JSON.$K$1];[.$A34];[$JSON.$L$1];[.$B34];[$JSON.$M$1])" office:value-type="string" office:string-value="{&quot;id&quot;:&quot;G-7&quot;,&quot;name&quot;:&quot;藤原定家&quot;,&quot;imageUrl&quot;:&quot;https://one-draw.jp/ijinden/cardlist/G01/card/G_007.png&quot;,&quot;expansion&quot;:12,&quot;type&quot;:1,&quot;level&quot;:4,&quot;color&quot;:4,&quot;term&quot;:2,&quot;trait&quot;:0,&quot;legacy&quot;:0,&quot;orderTable&quot;:33,&quot;orderDeck&quot;:124}," calcext:value-type="string">
            <text:p>{"id":"G-7","name":"藤原定家","imageUrl":"https://one-draw.jp/ijinden/cardlist/G01/card/G_007.png","expansion":12,"type":1,"level":4,"color":4,"term":2,"trait":0,"legacy":0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JSON.$A$1];[.$C35];[$JSON.$B$1];[.$E35];[$JSON.$C$1];[.$T35];[$JSON.$D$1];[.$G35];[$JSON.$E$1];[.$I35];[$JSON.$F$1];[.$L35];[$JSON.$G$1];[.$K35];[$JSON.$H$1];[.$O35];[$JSON.$I$1];[.$Q35];[$JSON.$J$1];[.$S35];[$JSON.$K$1];[.$A35];[$JSON.$L$1];[.$B35];[$JSON.$M$1])" office:value-type="string" office:string-value="{&quot;id&quot;:&quot;G-8&quot;,&quot;name&quot;:&quot;最澄&quot;,&quot;imageUrl&quot;:&quot;https://one-draw.jp/ijinden/cardlist/G01/card/G_008.png&quot;,&quot;expansion&quot;:12,&quot;type&quot;:1,&quot;level&quot;:8,&quot;color&quot;:4,&quot;term&quot;:1,&quot;trait&quot;:0,&quot;legacy&quot;:1,&quot;orderTable&quot;:34,&quot;orderDeck&quot;:221}," calcext:value-type="string">
            <text:p>{"id":"G-8","name":"最澄","imageUrl":"https://one-draw.jp/ijinden/cardlist/G01/card/G_008.png","expansion":12,"type":1,"level":8,"color":4,"term":1,"trait":0,"legacy":1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JSON.$A$1];[.$C36];[$JSON.$B$1];[.$E36];[$JSON.$C$1];[.$T36];[$JSON.$D$1];[.$G36];[$JSON.$E$1];[.$I36];[$JSON.$F$1];[.$L36];[$JSON.$G$1];[.$K36];[$JSON.$H$1];[.$O36];[$JSON.$I$1];[.$Q36];[$JSON.$J$1];[.$S36];[$JSON.$K$1];[.$A36];[$JSON.$L$1];[.$B36];[$JSON.$M$1])" office:value-type="string" office:string-value="{&quot;id&quot;:&quot;G-9&quot;,&quot;name&quot;:&quot;阿弥陀堂&quot;,&quot;imageUrl&quot;:&quot;https://one-draw.jp/ijinden/cardlist/G01/card/G_009.png&quot;,&quot;expansion&quot;:12,&quot;type&quot;:2,&quot;level&quot;:4,&quot;color&quot;:4,&quot;term&quot;:0,&quot;trait&quot;:0,&quot;legacy&quot;:0,&quot;orderTable&quot;:35,&quot;orderDeck&quot;:263}," calcext:value-type="string">
            <text:p>{"id":"G-9","name":"阿弥陀堂","imageUrl":"https://one-draw.jp/ijinden/cardlist/G01/card/G_009.png","expansion":12,"type":2,"level":4,"color":4,"term":0,"trait":0,"legacy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JSON.$A$1];[.$C37];[$JSON.$B$1];[.$E37];[$JSON.$C$1];[.$T37];[$JSON.$D$1];[.$G37];[$JSON.$E$1];[.$I37];[$JSON.$F$1];[.$L37];[$JSON.$G$1];[.$K37];[$JSON.$H$1];[.$O37];[$JSON.$I$1];[.$Q37];[$JSON.$J$1];[.$S37];[$JSON.$K$1];[.$A37];[$JSON.$L$1];[.$B37];[$JSON.$M$1])" office:value-type="string" office:string-value="{&quot;id&quot;:&quot;G-10&quot;,&quot;name&quot;:&quot;毘盧遮那仏像&quot;,&quot;imageUrl&quot;:&quot;https://one-draw.jp/ijinden/cardlist/G01/card/G_010.png&quot;,&quot;expansion&quot;:12,&quot;type&quot;:2,&quot;level&quot;:6,&quot;color&quot;:4,&quot;term&quot;:0,&quot;trait&quot;:0,&quot;legacy&quot;:1,&quot;orderTable&quot;:36,&quot;orderDeck&quot;:276}," calcext:value-type="string">
            <text:p>{"id":"G-10","name":"毘盧遮那仏像","imageUrl":"https://one-draw.jp/ijinden/cardlist/G01/card/G_010.png","expansion":12,"type":2,"level":6,"color":4,"term":0,"trait":0,"legacy":1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8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JSON.$A$1];[.$C38];[$JSON.$B$1];[.$E38];[$JSON.$C$1];[.$T38];[$JSON.$D$1];[.$G38];[$JSON.$E$1];[.$I38];[$JSON.$F$1];[.$L38];[$JSON.$G$1];[.$K38];[$JSON.$H$1];[.$O38];[$JSON.$I$1];[.$Q38];[$JSON.$J$1];[.$S38];[$JSON.$K$1];[.$A38];[$JSON.$L$1];[.$B38];[$JSON.$M$1])" office:value-type="string" office:string-value="{&quot;id&quot;:&quot;G-11&quot;,&quot;name&quot;:&quot;グロウ&quot;,&quot;imageUrl&quot;:&quot;https://one-draw.jp/ijinden/cardlist/G01/card/G_011.png&quot;,&quot;expansion&quot;:12,&quot;type&quot;:3,&quot;level&quot;:3,&quot;color&quot;:4,&quot;term&quot;:0,&quot;trait&quot;:0,&quot;legacy&quot;:2,&quot;orderTable&quot;:37,&quot;orderDeck&quot;:309}," calcext:value-type="string">
            <text:p>{"id":"G-11","name":"グロウ","imageUrl":"https://one-draw.jp/ijinden/cardlist/G01/card/G_011.png","expansion":12,"type":3,"level":3,"color":4,"term":0,"trait":0,"legacy":2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JSON.$A$1];[.$C39];[$JSON.$B$1];[.$E39];[$JSON.$C$1];[.$T39];[$JSON.$D$1];[.$G39];[$JSON.$E$1];[.$I39];[$JSON.$F$1];[.$L39];[$JSON.$G$1];[.$K39];[$JSON.$H$1];[.$O39];[$JSON.$I$1];[.$Q39];[$JSON.$J$1];[.$S39];[$JSON.$K$1];[.$A39];[$JSON.$L$1];[.$B39];[$JSON.$M$1])" office:value-type="string" office:string-value="{&quot;id&quot;:&quot;G-12&quot;,&quot;name&quot;:&quot;ギャザリング&quot;,&quot;imageUrl&quot;:&quot;https://one-draw.jp/ijinden/cardlist/G01/card/G_012.png&quot;,&quot;expansion&quot;:12,&quot;type&quot;:3,&quot;level&quot;:5,&quot;color&quot;:4,&quot;term&quot;:0,&quot;trait&quot;:0,&quot;legacy&quot;:1,&quot;orderTable&quot;:38,&quot;orderDeck&quot;:328}," calcext:value-type="string">
            <text:p>{"id":"G-12","name":"ギャザリング","imageUrl":"https://one-draw.jp/ijinden/cardlist/G01/card/G_012.png","expansion":12,"type":3,"level":5,"color":4,"term":0,"trait":0,"legacy":1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4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JSON.$A$1];[.$C40];[$JSON.$B$1];[.$E40];[$JSON.$C$1];[.$T40];[$JSON.$D$1];[.$G40];[$JSON.$E$1];[.$I40];[$JSON.$F$1];[.$L40];[$JSON.$G$1];[.$K40];[$JSON.$H$1];[.$O40];[$JSON.$I$1];[.$Q40];[$JSON.$J$1];[.$S40];[$JSON.$K$1];[.$A40];[$JSON.$L$1];[.$B40];[$JSON.$M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level&quot;:1,&quot;color&quot;:4,&quot;term&quot;:0,&quot;trait&quot;:0,&quot;legacy&quot;:3,&quot;orderTable&quot;:39,&quot;orderDeck&quot;:355}," calcext:value-type="string">
            <text:p>{"id":"G-13","name":"グリーンストーン","imageUrl":"https://one-draw.jp/ijinden/cardlist/G01/card/G_013.png","expansion":12,"type":4,"level":1,"color":4,"term":0,"trait":0,"legacy":3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JSON.$A$1];[.$C41];[$JSON.$B$1];[.$E41];[$JSON.$C$1];[.$T41];[$JSON.$D$1];[.$G41];[$JSON.$E$1];[.$I41];[$JSON.$F$1];[.$L41];[$JSON.$G$1];[.$K41];[$JSON.$H$1];[.$O41];[$JSON.$I$1];[.$Q41];[$JSON.$J$1];[.$S41];[$JSON.$K$1];[.$A41];[$JSON.$L$1];[.$B41];[$JSON.$M$1])" office:value-type="string" office:string-value="{&quot;id&quot;:&quot;1-1&quot;,&quot;name&quot;:&quot;織田信長&quot;,&quot;imageUrl&quot;:&quot;https://one-draw.jp/ijinden/cardlist/001/card/01_001.png&quot;,&quot;expansion&quot;:15,&quot;type&quot;:1,&quot;level&quot;:4,&quot;color&quot;:1,&quot;term&quot;:0,&quot;trait&quot;:0,&quot;legacy&quot;:0,&quot;orderTable&quot;:40,&quot;orderDeck&quot;:107}," calcext:value-type="string">
            <text:p>{"id":"1-1","name":"織田信長","imageUrl":"https://one-draw.jp/ijinden/cardlist/001/card/01_001.png","expansion":15,"type":1,"level":4,"color":1,"term":0,"trait":0,"legacy":0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JSON.$A$1];[.$C42];[$JSON.$B$1];[.$E42];[$JSON.$C$1];[.$T42];[$JSON.$D$1];[.$G42];[$JSON.$E$1];[.$I42];[$JSON.$F$1];[.$L42];[$JSON.$G$1];[.$K42];[$JSON.$H$1];[.$O42];[$JSON.$I$1];[.$Q42];[$JSON.$J$1];[.$S42];[$JSON.$K$1];[.$A42];[$JSON.$L$1];[.$B42];[$JSON.$M$1])" office:value-type="string" office:string-value="{&quot;id&quot;:&quot;1-2&quot;,&quot;name&quot;:&quot;クレオパトラ&quot;,&quot;imageUrl&quot;:&quot;https://one-draw.jp/ijinden/cardlist/001/card/01_002.png&quot;,&quot;expansion&quot;:15,&quot;type&quot;:1,&quot;level&quot;:5,&quot;color&quot;:1,&quot;term&quot;:0,&quot;trait&quot;:0,&quot;legacy&quot;:4,&quot;orderTable&quot;:41,&quot;orderDeck&quot;:145}," calcext:value-type="string">
            <text:p>{"id":"1-2","name":"クレオパトラ","imageUrl":"https://one-draw.jp/ijinden/cardlist/001/card/01_002.png","expansion":15,"type":1,"level":5,"color":1,"term":0,"trait":0,"legacy":4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JSON.$A$1];[.$C43];[$JSON.$B$1];[.$E43];[$JSON.$C$1];[.$T43];[$JSON.$D$1];[.$G43];[$JSON.$E$1];[.$I43];[$JSON.$F$1];[.$L43];[$JSON.$G$1];[.$K43];[$JSON.$H$1];[.$O43];[$JSON.$I$1];[.$Q43];[$JSON.$J$1];[.$S43];[$JSON.$K$1];[.$A43];[$JSON.$L$1];[.$B43];[$JSON.$M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level&quot;:3,&quot;color&quot;:2,&quot;term&quot;:0,&quot;trait&quot;:0,&quot;legacy&quot;:4,&quot;orderTable&quot;:42,&quot;orderDeck&quot;:77}," calcext:value-type="string">
            <text:p>{"id":"1-3","name":"マルティン・ルター","imageUrl":"https://one-draw.jp/ijinden/cardlist/001/card/01_003.png","expansion":15,"type":1,"level":3,"color":2,"term":0,"trait":0,"legacy":4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JSON.$A$1];[.$C44];[$JSON.$B$1];[.$E44];[$JSON.$C$1];[.$T44];[$JSON.$D$1];[.$G44];[$JSON.$E$1];[.$I44];[$JSON.$F$1];[.$L44];[$JSON.$G$1];[.$K44];[$JSON.$H$1];[.$O44];[$JSON.$I$1];[.$Q44];[$JSON.$J$1];[.$S44];[$JSON.$K$1];[.$A44];[$JSON.$L$1];[.$B44];[$JSON.$M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level&quot;:6,&quot;color&quot;:2,&quot;term&quot;:1,&quot;trait&quot;:0,&quot;legacy&quot;:0,&quot;orderTable&quot;:43,&quot;orderDeck&quot;:187}," calcext:value-type="string">
            <text:p>{"id":"1-4","name":"クリストファー・コロンブス","imageUrl":"https://one-draw.jp/ijinden/cardlist/001/card/01_004.png","expansion":15,"type":1,"level":6,"color":2,"term":1,"trait":0,"legacy":0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45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JSON.$A$1];[.$C45];[$JSON.$B$1];[.$E45];[$JSON.$C$1];[.$T45];[$JSON.$D$1];[.$G45];[$JSON.$E$1];[.$I45];[$JSON.$F$1];[.$L45];[$JSON.$G$1];[.$K45];[$JSON.$H$1];[.$O45];[$JSON.$I$1];[.$Q45];[$JSON.$J$1];[.$S45];[$JSON.$K$1];[.$A45];[$JSON.$L$1];[.$B45];[$JSON.$M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level&quot;:7,&quot;color&quot;:4,&quot;term&quot;:0,&quot;trait&quot;:4,&quot;legacy&quot;:0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level":7,"color":4,"term":0,"trait":4,"legacy":0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4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JSON.$A$1];[.$C46];[$JSON.$B$1];[.$E46];[$JSON.$C$1];[.$T46];[$JSON.$D$1];[.$G46];[$JSON.$E$1];[.$I46];[$JSON.$F$1];[.$L46];[$JSON.$G$1];[.$K46];[$JSON.$H$1];[.$O46];[$JSON.$I$1];[.$Q46];[$JSON.$J$1];[.$S46];[$JSON.$K$1];[.$A46];[$JSON.$L$1];[.$B46];[$JSON.$M$1])" office:value-type="string" office:string-value="{&quot;id&quot;:&quot;1-6&quot;,&quot;name&quot;:&quot;紫式部&quot;,&quot;imageUrl&quot;:&quot;https://one-draw.jp/ijinden/cardlist/001/card/01_006.png&quot;,&quot;expansion&quot;:15,&quot;type&quot;:1,&quot;level&quot;:8,&quot;color&quot;:4,&quot;term&quot;:2,&quot;trait&quot;:0,&quot;legacy&quot;:1,&quot;orderTable&quot;:45,&quot;orderDeck&quot;:222}," calcext:value-type="string">
            <text:p>{"id":"1-6","name":"紫式部","imageUrl":"https://one-draw.jp/ijinden/cardlist/001/card/01_006.png","expansion":15,"type":1,"level":8,"color":4,"term":2,"trait":0,"legacy":1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JSON.$A$1];[.$C47];[$JSON.$B$1];[.$E47];[$JSON.$C$1];[.$T47];[$JSON.$D$1];[.$G47];[$JSON.$E$1];[.$I47];[$JSON.$F$1];[.$L47];[$JSON.$G$1];[.$K47];[$JSON.$H$1];[.$O47];[$JSON.$I$1];[.$Q47];[$JSON.$J$1];[.$S47];[$JSON.$K$1];[.$A47];[$JSON.$L$1];[.$B47];[$JSON.$M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level&quot;:1,&quot;color&quot;:1,&quot;term&quot;:0,&quot;trait&quot;:0,&quot;legacy&quot;:4,&quot;orderTable&quot;:46,&quot;orderDeck&quot;:2}," calcext:value-type="string">
            <text:p>{"id":"1-7","name":"マーサ・ジェーン・カナリー","imageUrl":"https://one-draw.jp/ijinden/cardlist/001/card/01_007.png","expansion":15,"type":1,"level":1,"color":1,"term":0,"trait":0,"legacy":4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8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JSON.$A$1];[.$C48];[$JSON.$B$1];[.$E48];[$JSON.$C$1];[.$T48];[$JSON.$D$1];[.$G48];[$JSON.$E$1];[.$I48];[$JSON.$F$1];[.$L48];[$JSON.$G$1];[.$K48];[$JSON.$H$1];[.$O48];[$JSON.$I$1];[.$Q48];[$JSON.$J$1];[.$S48];[$JSON.$K$1];[.$A48];[$JSON.$L$1];[.$B48];[$JSON.$M$1])" office:value-type="string" office:string-value="{&quot;id&quot;:&quot;1-8&quot;,&quot;name&quot;:&quot;明智光秀&quot;,&quot;imageUrl&quot;:&quot;https://one-draw.jp/ijinden/cardlist/001/card/01_008.png&quot;,&quot;expansion&quot;:15,&quot;type&quot;:1,&quot;level&quot;:2,&quot;color&quot;:1,&quot;term&quot;:0,&quot;trait&quot;:1,&quot;legacy&quot;:0,&quot;orderTable&quot;:47,&quot;orderDeck&quot;:25}," calcext:value-type="string">
            <text:p>{"id":"1-8","name":"明智光秀","imageUrl":"https://one-draw.jp/ijinden/cardlist/001/card/01_008.png","expansion":15,"type":1,"level":2,"color":1,"term":0,"trait":1,"legacy":0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剣術</text:p>
          </table:table-cell>
          <table:table-cell table:formula="of:=IFERROR(VLOOKUP([.$P49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4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JSON.$A$1];[.$C49];[$JSON.$B$1];[.$E49];[$JSON.$C$1];[.$T49];[$JSON.$D$1];[.$G49];[$JSON.$E$1];[.$I49];[$JSON.$F$1];[.$L49];[$JSON.$G$1];[.$K49];[$JSON.$H$1];[.$O49];[$JSON.$I$1];[.$Q49];[$JSON.$J$1];[.$S49];[$JSON.$K$1];[.$A49];[$JSON.$L$1];[.$B49];[$JSON.$M$1])" office:value-type="string" office:string-value="{&quot;id&quot;:&quot;1-9&quot;,&quot;name&quot;:&quot;藤原純友&quot;,&quot;imageUrl&quot;:&quot;https://one-draw.jp/ijinden/cardlist/001/card/01_009.png&quot;,&quot;expansion&quot;:15,&quot;type&quot;:1,&quot;level&quot;:2,&quot;color&quot;:1,&quot;term&quot;:1,&quot;trait&quot;:1,&quot;legacy&quot;:4,&quot;orderTable&quot;:48,&quot;orderDeck&quot;:26}," calcext:value-type="string">
            <text:p>{"id":"1-9","name":"藤原純友","imageUrl":"https://one-draw.jp/ijinden/cardlist/001/card/01_009.png","expansion":15,"type":1,"level":2,"color":1,"term":1,"trait":1,"legacy":4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0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JSON.$A$1];[.$C50];[$JSON.$B$1];[.$E50];[$JSON.$C$1];[.$T50];[$JSON.$D$1];[.$G50];[$JSON.$E$1];[.$I50];[$JSON.$F$1];[.$L50];[$JSON.$G$1];[.$K50];[$JSON.$H$1];[.$O50];[$JSON.$I$1];[.$Q50];[$JSON.$J$1];[.$S50];[$JSON.$K$1];[.$A50];[$JSON.$L$1];[.$B50];[$JSON.$M$1])" office:value-type="string" office:string-value="{&quot;id&quot;:&quot;1-10&quot;,&quot;name&quot;:&quot;徳川家康&quot;,&quot;imageUrl&quot;:&quot;https://one-draw.jp/ijinden/cardlist/001/card/01_010.png&quot;,&quot;expansion&quot;:15,&quot;type&quot;:1,&quot;level&quot;:3,&quot;color&quot;:1,&quot;term&quot;:0,&quot;trait&quot;:1,&quot;legacy&quot;:4,&quot;orderTable&quot;:49,&quot;orderDeck&quot;:64}," calcext:value-type="string">
            <text:p>{"id":"1-10","name":"徳川家康","imageUrl":"https://one-draw.jp/ijinden/cardlist/001/card/01_010.png","expansion":15,"type":1,"level":3,"color":1,"term":0,"trait":1,"legacy":4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1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JSON.$A$1];[.$C51];[$JSON.$B$1];[.$E51];[$JSON.$C$1];[.$T51];[$JSON.$D$1];[.$G51];[$JSON.$E$1];[.$I51];[$JSON.$F$1];[.$L51];[$JSON.$G$1];[.$K51];[$JSON.$H$1];[.$O51];[$JSON.$I$1];[.$Q51];[$JSON.$J$1];[.$S51];[$JSON.$K$1];[.$A51];[$JSON.$L$1];[.$B51];[$JSON.$M$1])" office:value-type="string" office:string-value="{&quot;id&quot;:&quot;1-11&quot;,&quot;name&quot;:&quot;直江兼続&quot;,&quot;imageUrl&quot;:&quot;https://one-draw.jp/ijinden/cardlist/001/card/01_011.png&quot;,&quot;expansion&quot;:15,&quot;type&quot;:1,&quot;level&quot;:3,&quot;color&quot;:1,&quot;term&quot;:0,&quot;trait&quot;:1,&quot;legacy&quot;:4,&quot;orderTable&quot;:50,&quot;orderDeck&quot;:65}," calcext:value-type="string">
            <text:p>{"id":"1-11","name":"直江兼続","imageUrl":"https://one-draw.jp/ijinden/cardlist/001/card/01_011.png","expansion":15,"type":1,"level":3,"color":1,"term":0,"trait":1,"legacy":4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JSON.$A$1];[.$C52];[$JSON.$B$1];[.$E52];[$JSON.$C$1];[.$T52];[$JSON.$D$1];[.$G52];[$JSON.$E$1];[.$I52];[$JSON.$F$1];[.$L52];[$JSON.$G$1];[.$K52];[$JSON.$H$1];[.$O52];[$JSON.$I$1];[.$Q52];[$JSON.$J$1];[.$S52];[$JSON.$K$1];[.$A52];[$JSON.$L$1];[.$B52];[$JSON.$M$1])" office:value-type="string" office:string-value="{&quot;id&quot;:&quot;1-12&quot;,&quot;name&quot;:&quot;藤原頼通&quot;,&quot;imageUrl&quot;:&quot;https://one-draw.jp/ijinden/cardlist/001/card/01_012.png&quot;,&quot;expansion&quot;:15,&quot;type&quot;:1,&quot;level&quot;:3,&quot;color&quot;:1,&quot;term&quot;:2,&quot;trait&quot;:0,&quot;legacy&quot;:4,&quot;orderTable&quot;:51,&quot;orderDeck&quot;:66}," calcext:value-type="string">
            <text:p>{"id":"1-12","name":"藤原頼通","imageUrl":"https://one-draw.jp/ijinden/cardlist/001/card/01_012.png","expansion":15,"type":1,"level":3,"color":1,"term":2,"trait":0,"legacy":4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JSON.$A$1];[.$C53];[$JSON.$B$1];[.$E53];[$JSON.$C$1];[.$T53];[$JSON.$D$1];[.$G53];[$JSON.$E$1];[.$I53];[$JSON.$F$1];[.$L53];[$JSON.$G$1];[.$K53];[$JSON.$H$1];[.$O53];[$JSON.$I$1];[.$Q53];[$JSON.$J$1];[.$S53];[$JSON.$K$1];[.$A53];[$JSON.$L$1];[.$B53];[$JSON.$M$1])" office:value-type="string" office:string-value="{&quot;id&quot;:&quot;1-13&quot;,&quot;name&quot;:&quot;北条政子&quot;,&quot;imageUrl&quot;:&quot;https://one-draw.jp/ijinden/cardlist/001/card/01_013.png&quot;,&quot;expansion&quot;:15,&quot;type&quot;:1,&quot;level&quot;:3,&quot;color&quot;:1,&quot;term&quot;:0,&quot;trait&quot;:0,&quot;legacy&quot;:0,&quot;orderTable&quot;:52,&quot;orderDeck&quot;:67}," calcext:value-type="string">
            <text:p>{"id":"1-13","name":"北条政子","imageUrl":"https://one-draw.jp/ijinden/cardlist/001/card/01_013.png","expansion":15,"type":1,"level":3,"color":1,"term":0,"trait":0,"legacy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5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JSON.$A$1];[.$C54];[$JSON.$B$1];[.$E54];[$JSON.$C$1];[.$T54];[$JSON.$D$1];[.$G54];[$JSON.$E$1];[.$I54];[$JSON.$F$1];[.$L54];[$JSON.$G$1];[.$K54];[$JSON.$H$1];[.$O54];[$JSON.$I$1];[.$Q54];[$JSON.$J$1];[.$S54];[$JSON.$K$1];[.$A54];[$JSON.$L$1];[.$B54];[$JSON.$M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level&quot;:4,&quot;color&quot;:1,&quot;term&quot;:0,&quot;trait&quot;:0,&quot;legacy&quot;:4,&quot;orderTable&quot;:53,&quot;orderDeck&quot;:108}," calcext:value-type="string">
            <text:p>{"id":"1-14","name":"ジョージ・アームストロング・カスター","imageUrl":"https://one-draw.jp/ijinden/cardlist/001/card/01_014.png","expansion":15,"type":1,"level":4,"color":1,"term":0,"trait":0,"legacy":4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JSON.$A$1];[.$C55];[$JSON.$B$1];[.$E55];[$JSON.$C$1];[.$T55];[$JSON.$D$1];[.$G55];[$JSON.$E$1];[.$I55];[$JSON.$F$1];[.$L55];[$JSON.$G$1];[.$K55];[$JSON.$H$1];[.$O55];[$JSON.$I$1];[.$Q55];[$JSON.$J$1];[.$S55];[$JSON.$K$1];[.$A55];[$JSON.$L$1];[.$B55];[$JSON.$M$1])" office:value-type="string" office:string-value="{&quot;id&quot;:&quot;1-15&quot;,&quot;name&quot;:&quot;中臣鎌足&quot;,&quot;imageUrl&quot;:&quot;https://one-draw.jp/ijinden/cardlist/001/card/01_015.png&quot;,&quot;expansion&quot;:15,&quot;type&quot;:1,&quot;level&quot;:4,&quot;color&quot;:1,&quot;term&quot;:0,&quot;trait&quot;:0,&quot;legacy&quot;:0,&quot;orderTable&quot;:54,&quot;orderDeck&quot;:109}," calcext:value-type="string">
            <text:p>{"id":"1-15","name":"中臣鎌足","imageUrl":"https://one-draw.jp/ijinden/cardlist/001/card/01_015.png","expansion":15,"type":1,"level":4,"color":1,"term":0,"trait":0,"legacy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JSON.$A$1];[.$C56];[$JSON.$B$1];[.$E56];[$JSON.$C$1];[.$T56];[$JSON.$D$1];[.$G56];[$JSON.$E$1];[.$I56];[$JSON.$F$1];[.$L56];[$JSON.$G$1];[.$K56];[$JSON.$H$1];[.$O56];[$JSON.$I$1];[.$Q56];[$JSON.$J$1];[.$S56];[$JSON.$K$1];[.$A56];[$JSON.$L$1];[.$B56];[$JSON.$M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level&quot;:4,&quot;color&quot;:1,&quot;term&quot;:0,&quot;trait&quot;:0,&quot;legacy&quot;:0,&quot;orderTable&quot;:55,&quot;orderDeck&quot;:110}," calcext:value-type="string">
            <text:p>{"id":"1-16","name":"マルクス・アントニウス","imageUrl":"https://one-draw.jp/ijinden/cardlist/001/card/01_016.png","expansion":15,"type":1,"level":4,"color":1,"term":0,"trait":0,"legacy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JSON.$A$1];[.$C57];[$JSON.$B$1];[.$E57];[$JSON.$C$1];[.$T57];[$JSON.$D$1];[.$G57];[$JSON.$E$1];[.$I57];[$JSON.$F$1];[.$L57];[$JSON.$G$1];[.$K57];[$JSON.$H$1];[.$O57];[$JSON.$I$1];[.$Q57];[$JSON.$J$1];[.$S57];[$JSON.$K$1];[.$A57];[$JSON.$L$1];[.$B57];[$JSON.$M$1])" office:value-type="string" office:string-value="{&quot;id&quot;:&quot;1-17&quot;,&quot;name&quot;:&quot;藤原道長&quot;,&quot;imageUrl&quot;:&quot;https://one-draw.jp/ijinden/cardlist/001/card/01_017.png&quot;,&quot;expansion&quot;:15,&quot;type&quot;:1,&quot;level&quot;:5,&quot;color&quot;:1,&quot;term&quot;:0,&quot;trait&quot;:0,&quot;legacy&quot;:0,&quot;orderTable&quot;:56,&quot;orderDeck&quot;:146}," calcext:value-type="string">
            <text:p>{"id":"1-17","name":"藤原道長","imageUrl":"https://one-draw.jp/ijinden/cardlist/001/card/01_017.png","expansion":15,"type":1,"level":5,"color":1,"term":0,"trait":0,"legacy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JSON.$A$1];[.$C58];[$JSON.$B$1];[.$E58];[$JSON.$C$1];[.$T58];[$JSON.$D$1];[.$G58];[$JSON.$E$1];[.$I58];[$JSON.$F$1];[.$L58];[$JSON.$G$1];[.$K58];[$JSON.$H$1];[.$O58];[$JSON.$I$1];[.$Q58];[$JSON.$J$1];[.$S58];[$JSON.$K$1];[.$A58];[$JSON.$L$1];[.$B58];[$JSON.$M$1])" office:value-type="string" office:string-value="{&quot;id&quot;:&quot;1-18&quot;,&quot;name&quot;:&quot;源頼朝&quot;,&quot;imageUrl&quot;:&quot;https://one-draw.jp/ijinden/cardlist/001/card/01_018.png&quot;,&quot;expansion&quot;:15,&quot;type&quot;:1,&quot;level&quot;:5,&quot;color&quot;:1,&quot;term&quot;:0,&quot;trait&quot;:0,&quot;legacy&quot;:0,&quot;orderTable&quot;:57,&quot;orderDeck&quot;:147}," calcext:value-type="string">
            <text:p>{"id":"1-18","name":"源頼朝","imageUrl":"https://one-draw.jp/ijinden/cardlist/001/card/01_018.png","expansion":15,"type":1,"level":5,"color":1,"term":0,"trait":0,"legacy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JSON.$A$1];[.$C59];[$JSON.$B$1];[.$E59];[$JSON.$C$1];[.$T59];[$JSON.$D$1];[.$G59];[$JSON.$E$1];[.$I59];[$JSON.$F$1];[.$L59];[$JSON.$G$1];[.$K59];[$JSON.$H$1];[.$O59];[$JSON.$I$1];[.$Q59];[$JSON.$J$1];[.$S59];[$JSON.$K$1];[.$A59];[$JSON.$L$1];[.$B59];[$JSON.$M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level&quot;:7,&quot;color&quot;:1,&quot;term&quot;:0,&quot;trait&quot;:0,&quot;legacy&quot;:0,&quot;orderTable&quot;:58,&quot;orderDeck&quot;:203}," calcext:value-type="string">
            <text:p>{"id":"1-19","name":"ガイウス・ユリウス・カエサル","imageUrl":"https://one-draw.jp/ijinden/cardlist/001/card/01_019.png","expansion":15,"type":1,"level":7,"color":1,"term":0,"trait":0,"legacy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JSON.$A$1];[.$C60];[$JSON.$B$1];[.$E60];[$JSON.$C$1];[.$T60];[$JSON.$D$1];[.$G60];[$JSON.$E$1];[.$I60];[$JSON.$F$1];[.$L60];[$JSON.$G$1];[.$K60];[$JSON.$H$1];[.$O60];[$JSON.$I$1];[.$Q60];[$JSON.$J$1];[.$S60];[$JSON.$K$1];[.$A60];[$JSON.$L$1];[.$B60];[$JSON.$M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level&quot;:1,&quot;color&quot;:2,&quot;term&quot;:0,&quot;trait&quot;:0,&quot;legacy&quot;:4,&quot;orderTable&quot;:59,&quot;orderDeck&quot;:7}," calcext:value-type="string">
            <text:p>{"id":"1-20","name":"ハンス・アクセル・フォン・フェルセン","imageUrl":"https://one-draw.jp/ijinden/cardlist/001/card/01_020.png","expansion":15,"type":1,"level":1,"color":2,"term":0,"trait":0,"legacy":4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JSON.$A$1];[.$C61];[$JSON.$B$1];[.$E61];[$JSON.$C$1];[.$T61];[$JSON.$D$1];[.$G61];[$JSON.$E$1];[.$I61];[$JSON.$F$1];[.$L61];[$JSON.$G$1];[.$K61];[$JSON.$H$1];[.$O61];[$JSON.$I$1];[.$Q61];[$JSON.$J$1];[.$S61];[$JSON.$K$1];[.$A61];[$JSON.$L$1];[.$B61];[$JSON.$M$1])" office:value-type="string" office:string-value="{&quot;id&quot;:&quot;1-21&quot;,&quot;name&quot;:&quot;鑑真&quot;,&quot;imageUrl&quot;:&quot;https://one-draw.jp/ijinden/cardlist/001/card/01_021.png&quot;,&quot;expansion&quot;:15,&quot;type&quot;:1,&quot;level&quot;:2,&quot;color&quot;:2,&quot;term&quot;:1,&quot;trait&quot;:0,&quot;legacy&quot;:4,&quot;orderTable&quot;:60,&quot;orderDeck&quot;:34}," calcext:value-type="string">
            <text:p>{"id":"1-21","name":"鑑真","imageUrl":"https://one-draw.jp/ijinden/cardlist/001/card/01_021.png","expansion":15,"type":1,"level":2,"color":2,"term":1,"trait":0,"legacy":4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6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JSON.$A$1];[.$C62];[$JSON.$B$1];[.$E62];[$JSON.$C$1];[.$T62];[$JSON.$D$1];[.$G62];[$JSON.$E$1];[.$I62];[$JSON.$F$1];[.$L62];[$JSON.$G$1];[.$K62];[$JSON.$H$1];[.$O62];[$JSON.$I$1];[.$Q62];[$JSON.$J$1];[.$S62];[$JSON.$K$1];[.$A62];[$JSON.$L$1];[.$B62];[$JSON.$M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level&quot;:2,&quot;color&quot;:2,&quot;term&quot;:0,&quot;trait&quot;:0,&quot;legacy&quot;:1,&quot;orderTable&quot;:61,&quot;orderDeck&quot;:35}," calcext:value-type="string">
            <text:p>{"id":"1-22","name":"ジャンヌ・ダルク","imageUrl":"https://one-draw.jp/ijinden/cardlist/001/card/01_022.png","expansion":15,"type":1,"level":2,"color":2,"term":0,"trait":0,"legacy":1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6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JSON.$A$1];[.$C63];[$JSON.$B$1];[.$E63];[$JSON.$C$1];[.$T63];[$JSON.$D$1];[.$G63];[$JSON.$E$1];[.$I63];[$JSON.$F$1];[.$L63];[$JSON.$G$1];[.$K63];[$JSON.$H$1];[.$O63];[$JSON.$I$1];[.$Q63];[$JSON.$J$1];[.$S63];[$JSON.$K$1];[.$A63];[$JSON.$L$1];[.$B63];[$JSON.$M$1])" office:value-type="string" office:string-value="{&quot;id&quot;:&quot;1-23&quot;,&quot;name&quot;:&quot;ドナテッロ&quot;,&quot;imageUrl&quot;:&quot;https://one-draw.jp/ijinden/cardlist/001/card/01_023.png&quot;,&quot;expansion&quot;:15,&quot;type&quot;:1,&quot;level&quot;:2,&quot;color&quot;:2,&quot;term&quot;:0,&quot;trait&quot;:2,&quot;legacy&quot;:4,&quot;orderTable&quot;:62,&quot;orderDeck&quot;:36}," calcext:value-type="string">
            <text:p>{"id":"1-23","name":"ドナテッロ","imageUrl":"https://one-draw.jp/ijinden/cardlist/001/card/01_023.png","expansion":15,"type":1,"level":2,"color":2,"term":0,"trait":2,"legacy":4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6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JSON.$A$1];[.$C64];[$JSON.$B$1];[.$E64];[$JSON.$C$1];[.$T64];[$JSON.$D$1];[.$G64];[$JSON.$E$1];[.$I64];[$JSON.$F$1];[.$L64];[$JSON.$G$1];[.$K64];[$JSON.$H$1];[.$O64];[$JSON.$I$1];[.$Q64];[$JSON.$J$1];[.$S64];[$JSON.$K$1];[.$A64];[$JSON.$L$1];[.$B64];[$JSON.$M$1])" office:value-type="string" office:string-value="{&quot;id&quot;:&quot;1-24&quot;,&quot;name&quot;:&quot;孔子&quot;,&quot;imageUrl&quot;:&quot;https://one-draw.jp/ijinden/cardlist/001/card/01_024.png&quot;,&quot;expansion&quot;:15,&quot;type&quot;:1,&quot;level&quot;:3,&quot;color&quot;:2,&quot;term&quot;:0,&quot;trait&quot;:0,&quot;legacy&quot;:4,&quot;orderTable&quot;:63,&quot;orderDeck&quot;:78}," calcext:value-type="string">
            <text:p>{"id":"1-24","name":"孔子","imageUrl":"https://one-draw.jp/ijinden/cardlist/001/card/01_024.png","expansion":15,"type":1,"level":3,"color":2,"term":0,"trait":0,"legacy":4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JSON.$A$1];[.$C65];[$JSON.$B$1];[.$E65];[$JSON.$C$1];[.$T65];[$JSON.$D$1];[.$G65];[$JSON.$E$1];[.$I65];[$JSON.$F$1];[.$L65];[$JSON.$G$1];[.$K65];[$JSON.$H$1];[.$O65];[$JSON.$I$1];[.$Q65];[$JSON.$J$1];[.$S65];[$JSON.$K$1];[.$A65];[$JSON.$L$1];[.$B65];[$JSON.$M$1])" office:value-type="string" office:string-value="{&quot;id&quot;:&quot;1-25&quot;,&quot;name&quot;:&quot;始皇帝&quot;,&quot;imageUrl&quot;:&quot;https://one-draw.jp/ijinden/cardlist/001/card/01_025.png&quot;,&quot;expansion&quot;:15,&quot;type&quot;:1,&quot;level&quot;:5,&quot;color&quot;:2,&quot;term&quot;:0,&quot;trait&quot;:0,&quot;legacy&quot;:0,&quot;orderTable&quot;:64,&quot;orderDeck&quot;:155}," calcext:value-type="string">
            <text:p>{"id":"1-25","name":"始皇帝","imageUrl":"https://one-draw.jp/ijinden/cardlist/001/card/01_025.png","expansion":15,"type":1,"level":5,"color":2,"term":0,"trait":0,"legacy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JSON.$A$1];[.$C66];[$JSON.$B$1];[.$E66];[$JSON.$C$1];[.$T66];[$JSON.$D$1];[.$G66];[$JSON.$E$1];[.$I66];[$JSON.$F$1];[.$L66];[$JSON.$G$1];[.$K66];[$JSON.$H$1];[.$O66];[$JSON.$I$1];[.$Q66];[$JSON.$J$1];[.$S66];[$JSON.$K$1];[.$A66];[$JSON.$L$1];[.$B66];[$JSON.$M$1])" office:value-type="string" office:string-value="{&quot;id&quot;:&quot;1-26&quot;,&quot;name&quot;:&quot;メアリー1世&quot;,&quot;imageUrl&quot;:&quot;https://one-draw.jp/ijinden/cardlist/001/card/01_026.png&quot;,&quot;expansion&quot;:15,&quot;type&quot;:1,&quot;level&quot;:3,&quot;color&quot;:2,&quot;term&quot;:0,&quot;trait&quot;:0,&quot;legacy&quot;:0,&quot;orderTable&quot;:65,&quot;orderDeck&quot;:79}," calcext:value-type="string">
            <text:p>{"id":"1-26","name":"メアリー1世","imageUrl":"https://one-draw.jp/ijinden/cardlist/001/card/01_026.png","expansion":15,"type":1,"level":3,"color":2,"term":0,"trait":0,"legacy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JSON.$A$1];[.$C67];[$JSON.$B$1];[.$E67];[$JSON.$C$1];[.$T67];[$JSON.$D$1];[.$G67];[$JSON.$E$1];[.$I67];[$JSON.$F$1];[.$L67];[$JSON.$G$1];[.$K67];[$JSON.$H$1];[.$O67];[$JSON.$I$1];[.$Q67];[$JSON.$J$1];[.$S67];[$JSON.$K$1];[.$A67];[$JSON.$L$1];[.$B67];[$JSON.$M$1])" office:value-type="string" office:string-value="{&quot;id&quot;:&quot;1-27&quot;,&quot;name&quot;:&quot;玄宗&quot;,&quot;imageUrl&quot;:&quot;https://one-draw.jp/ijinden/cardlist/001/card/01_027.png&quot;,&quot;expansion&quot;:15,&quot;type&quot;:1,&quot;level&quot;:4,&quot;color&quot;:2,&quot;term&quot;:0,&quot;trait&quot;:0,&quot;legacy&quot;:0,&quot;orderTable&quot;:66,&quot;orderDeck&quot;:114}," calcext:value-type="string">
            <text:p>{"id":"1-27","name":"玄宗","imageUrl":"https://one-draw.jp/ijinden/cardlist/001/card/01_027.png","expansion":15,"type":1,"level":4,"color":2,"term":0,"trait":0,"legacy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JSON.$A$1];[.$C68];[$JSON.$B$1];[.$E68];[$JSON.$C$1];[.$T68];[$JSON.$D$1];[.$G68];[$JSON.$E$1];[.$I68];[$JSON.$F$1];[.$L68];[$JSON.$G$1];[.$K68];[$JSON.$H$1];[.$O68];[$JSON.$I$1];[.$Q68];[$JSON.$J$1];[.$S68];[$JSON.$K$1];[.$A68];[$JSON.$L$1];[.$B68];[$JSON.$M$1])" office:value-type="string" office:string-value="{&quot;id&quot;:&quot;1-28&quot;,&quot;name&quot;:&quot;シャルル7世&quot;,&quot;imageUrl&quot;:&quot;https://one-draw.jp/ijinden/cardlist/001/card/01_028.png&quot;,&quot;expansion&quot;:15,&quot;type&quot;:1,&quot;level&quot;:4,&quot;color&quot;:2,&quot;term&quot;:0,&quot;trait&quot;:0,&quot;legacy&quot;:0,&quot;orderTable&quot;:67,&quot;orderDeck&quot;:115}," calcext:value-type="string">
            <text:p>{"id":"1-28","name":"シャルル7世","imageUrl":"https://one-draw.jp/ijinden/cardlist/001/card/01_028.png","expansion":15,"type":1,"level":4,"color":2,"term":0,"trait":0,"legacy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6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JSON.$A$1];[.$C69];[$JSON.$B$1];[.$E69];[$JSON.$C$1];[.$T69];[$JSON.$D$1];[.$G69];[$JSON.$E$1];[.$I69];[$JSON.$F$1];[.$L69];[$JSON.$G$1];[.$K69];[$JSON.$H$1];[.$O69];[$JSON.$I$1];[.$Q69];[$JSON.$J$1];[.$S69];[$JSON.$K$1];[.$A69];[$JSON.$L$1];[.$B69];[$JSON.$M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level&quot;:4,&quot;color&quot;:2,&quot;term&quot;:1,&quot;trait&quot;:0,&quot;legacy&quot;:0,&quot;orderTable&quot;:68,&quot;orderDeck&quot;:116}," calcext:value-type="string">
            <text:p>{"id":"1-29","name":"フランシスコ・ザビエル","imageUrl":"https://one-draw.jp/ijinden/cardlist/001/card/01_029.png","expansion":15,"type":1,"level":4,"color":2,"term":1,"trait":0,"legacy":0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JSON.$A$1];[.$C70];[$JSON.$B$1];[.$E70];[$JSON.$C$1];[.$T70];[$JSON.$D$1];[.$G70];[$JSON.$E$1];[.$I70];[$JSON.$F$1];[.$L70];[$JSON.$G$1];[.$K70];[$JSON.$H$1];[.$O70];[$JSON.$I$1];[.$Q70];[$JSON.$J$1];[.$S70];[$JSON.$K$1];[.$A70];[$JSON.$L$1];[.$B70];[$JSON.$M$1])" office:value-type="string" office:string-value="{&quot;id&quot;:&quot;1-30&quot;,&quot;name&quot;:&quot;チンギス・ハン&quot;,&quot;imageUrl&quot;:&quot;https://one-draw.jp/ijinden/cardlist/001/card/01_030.png&quot;,&quot;expansion&quot;:15,&quot;type&quot;:1,&quot;level&quot;:5,&quot;color&quot;:2,&quot;term&quot;:0,&quot;trait&quot;:0,&quot;legacy&quot;:0,&quot;orderTable&quot;:69,&quot;orderDeck&quot;:156}," calcext:value-type="string">
            <text:p>{"id":"1-30","name":"チンギス・ハン","imageUrl":"https://one-draw.jp/ijinden/cardlist/001/card/01_030.png","expansion":15,"type":1,"level":5,"color":2,"term":0,"trait":0,"legacy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1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JSON.$A$1];[.$C71];[$JSON.$B$1];[.$E71];[$JSON.$C$1];[.$T71];[$JSON.$D$1];[.$G71];[$JSON.$E$1];[.$I71];[$JSON.$F$1];[.$L71];[$JSON.$G$1];[.$K71];[$JSON.$H$1];[.$O71];[$JSON.$I$1];[.$Q71];[$JSON.$J$1];[.$S71];[$JSON.$K$1];[.$A71];[$JSON.$L$1];[.$B71];[$JSON.$M$1])" office:value-type="string" office:string-value="{&quot;id&quot;:&quot;1-31&quot;,&quot;name&quot;:&quot;ミケランジェロ&quot;,&quot;imageUrl&quot;:&quot;https://one-draw.jp/ijinden/cardlist/001/card/01_031.png&quot;,&quot;expansion&quot;:15,&quot;type&quot;:1,&quot;level&quot;:5,&quot;color&quot;:2,&quot;term&quot;:0,&quot;trait&quot;:2,&quot;legacy&quot;:0,&quot;orderTable&quot;:70,&quot;orderDeck&quot;:157}," calcext:value-type="string">
            <text:p>{"id":"1-31","name":"ミケランジェロ","imageUrl":"https://one-draw.jp/ijinden/cardlist/001/card/01_031.png","expansion":15,"type":1,"level":5,"color":2,"term":0,"trait":2,"legacy":0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JSON.$A$1];[.$C72];[$JSON.$B$1];[.$E72];[$JSON.$C$1];[.$T72];[$JSON.$D$1];[.$G72];[$JSON.$E$1];[.$I72];[$JSON.$F$1];[.$L72];[$JSON.$G$1];[.$K72];[$JSON.$H$1];[.$O72];[$JSON.$I$1];[.$Q72];[$JSON.$J$1];[.$S72];[$JSON.$K$1];[.$A72];[$JSON.$L$1];[.$B72];[$JSON.$M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level&quot;:6,&quot;color&quot;:2,&quot;term&quot;:0,&quot;trait&quot;:0,&quot;legacy&quot;:1,&quot;orderTable&quot;:71,&quot;orderDeck&quot;:188}," calcext:value-type="string">
            <text:p>{"id":"1-32","name":"マリー・アントワネット","imageUrl":"https://one-draw.jp/ijinden/cardlist/001/card/01_032.png","expansion":15,"type":1,"level":6,"color":2,"term":0,"trait":0,"legacy":1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JSON.$A$1];[.$C73];[$JSON.$B$1];[.$E73];[$JSON.$C$1];[.$T73];[$JSON.$D$1];[.$G73];[$JSON.$E$1];[.$I73];[$JSON.$F$1];[.$L73];[$JSON.$G$1];[.$K73];[$JSON.$H$1];[.$O73];[$JSON.$I$1];[.$Q73];[$JSON.$J$1];[.$S73];[$JSON.$K$1];[.$A73];[$JSON.$L$1];[.$B73];[$JSON.$M$1])" office:value-type="string" office:string-value="{&quot;id&quot;:&quot;1-33&quot;,&quot;name&quot;:&quot;千利休&quot;,&quot;imageUrl&quot;:&quot;https://one-draw.jp/ijinden/cardlist/001/card/01_033.png&quot;,&quot;expansion&quot;:15,&quot;type&quot;:1,&quot;level&quot;:1,&quot;color&quot;:4,&quot;term&quot;:0,&quot;trait&quot;:0,&quot;legacy&quot;:4,&quot;orderTable&quot;:72,&quot;orderDeck&quot;:13}," calcext:value-type="string">
            <text:p>{"id":"1-33","name":"千利休","imageUrl":"https://one-draw.jp/ijinden/cardlist/001/card/01_033.png","expansion":15,"type":1,"level":1,"color":4,"term":0,"trait":0,"legacy":4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4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JSON.$A$1];[.$C74];[$JSON.$B$1];[.$E74];[$JSON.$C$1];[.$T74];[$JSON.$D$1];[.$G74];[$JSON.$E$1];[.$I74];[$JSON.$F$1];[.$L74];[$JSON.$G$1];[.$K74];[$JSON.$H$1];[.$O74];[$JSON.$I$1];[.$Q74];[$JSON.$J$1];[.$S74];[$JSON.$K$1];[.$A74];[$JSON.$L$1];[.$B74];[$JSON.$M$1])" office:value-type="string" office:string-value="{&quot;id&quot;:&quot;1-34&quot;,&quot;name&quot;:&quot;狩野永徳&quot;,&quot;imageUrl&quot;:&quot;https://one-draw.jp/ijinden/cardlist/001/card/01_034.png&quot;,&quot;expansion&quot;:15,&quot;type&quot;:1,&quot;level&quot;:2,&quot;color&quot;:4,&quot;term&quot;:0,&quot;trait&quot;:2,&quot;legacy&quot;:4,&quot;orderTable&quot;:73,&quot;orderDeck&quot;:45}," calcext:value-type="string">
            <text:p>{"id":"1-34","name":"狩野永徳","imageUrl":"https://one-draw.jp/ijinden/cardlist/001/card/01_034.png","expansion":15,"type":1,"level":2,"color":4,"term":0,"trait":2,"legacy":4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JSON.$A$1];[.$C75];[$JSON.$B$1];[.$E75];[$JSON.$C$1];[.$T75];[$JSON.$D$1];[.$G75];[$JSON.$E$1];[.$I75];[$JSON.$F$1];[.$L75];[$JSON.$G$1];[.$K75];[$JSON.$H$1];[.$O75];[$JSON.$I$1];[.$Q75];[$JSON.$J$1];[.$S75];[$JSON.$K$1];[.$A75];[$JSON.$L$1];[.$B75];[$JSON.$M$1])" office:value-type="string" office:string-value="{&quot;id&quot;:&quot;1-35&quot;,&quot;name&quot;:&quot;安倍晴明&quot;,&quot;imageUrl&quot;:&quot;https://one-draw.jp/ijinden/cardlist/001/card/01_035.png&quot;,&quot;expansion&quot;:15,&quot;type&quot;:1,&quot;level&quot;:3,&quot;color&quot;:4,&quot;term&quot;:0,&quot;trait&quot;:0,&quot;legacy&quot;:1,&quot;orderTable&quot;:74,&quot;orderDeck&quot;:86}," calcext:value-type="string">
            <text:p>{"id":"1-35","name":"安倍晴明","imageUrl":"https://one-draw.jp/ijinden/cardlist/001/card/01_035.png","expansion":15,"type":1,"level":3,"color":4,"term":0,"trait":0,"legacy":1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7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JSON.$A$1];[.$C76];[$JSON.$B$1];[.$E76];[$JSON.$C$1];[.$T76];[$JSON.$D$1];[.$G76];[$JSON.$E$1];[.$I76];[$JSON.$F$1];[.$L76];[$JSON.$G$1];[.$K76];[$JSON.$H$1];[.$O76];[$JSON.$I$1];[.$Q76];[$JSON.$J$1];[.$S76];[$JSON.$K$1];[.$A76];[$JSON.$L$1];[.$B76];[$JSON.$M$1])" office:value-type="string" office:string-value="{&quot;id&quot;:&quot;1-36&quot;,&quot;name&quot;:&quot;吉田兼好&quot;,&quot;imageUrl&quot;:&quot;https://one-draw.jp/ijinden/cardlist/001/card/01_036.png&quot;,&quot;expansion&quot;:15,&quot;type&quot;:1,&quot;level&quot;:3,&quot;color&quot;:4,&quot;term&quot;:2,&quot;trait&quot;:0,&quot;legacy&quot;:4,&quot;orderTable&quot;:75,&quot;orderDeck&quot;:87}," calcext:value-type="string">
            <text:p>{"id":"1-36","name":"吉田兼好","imageUrl":"https://one-draw.jp/ijinden/cardlist/001/card/01_036.png","expansion":15,"type":1,"level":3,"color":4,"term":2,"trait":0,"legacy":4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7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JSON.$A$1];[.$C77];[$JSON.$B$1];[.$E77];[$JSON.$C$1];[.$T77];[$JSON.$D$1];[.$G77];[$JSON.$E$1];[.$I77];[$JSON.$F$1];[.$L77];[$JSON.$G$1];[.$K77];[$JSON.$H$1];[.$O77];[$JSON.$I$1];[.$Q77];[$JSON.$J$1];[.$S77];[$JSON.$K$1];[.$A77];[$JSON.$L$1];[.$B77];[$JSON.$M$1])" office:value-type="string" office:string-value="{&quot;id&quot;:&quot;1-37&quot;,&quot;name&quot;:&quot;蘆屋道満&quot;,&quot;imageUrl&quot;:&quot;https://one-draw.jp/ijinden/cardlist/001/card/01_037.png&quot;,&quot;expansion&quot;:15,&quot;type&quot;:1,&quot;level&quot;:4,&quot;color&quot;:4,&quot;term&quot;:0,&quot;trait&quot;:0,&quot;legacy&quot;:1,&quot;orderTable&quot;:76,&quot;orderDeck&quot;:125}," calcext:value-type="string">
            <text:p>{"id":"1-37","name":"蘆屋道満","imageUrl":"https://one-draw.jp/ijinden/cardlist/001/card/01_037.png","expansion":15,"type":1,"level":4,"color":4,"term":0,"trait":0,"legacy":1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JSON.$A$1];[.$C78];[$JSON.$B$1];[.$E78];[$JSON.$C$1];[.$T78];[$JSON.$D$1];[.$G78];[$JSON.$E$1];[.$I78];[$JSON.$F$1];[.$L78];[$JSON.$G$1];[.$K78];[$JSON.$H$1];[.$O78];[$JSON.$I$1];[.$Q78];[$JSON.$J$1];[.$S78];[$JSON.$K$1];[.$A78];[$JSON.$L$1];[.$B78];[$JSON.$M$1])" office:value-type="string" office:string-value="{&quot;id&quot;:&quot;1-38&quot;,&quot;name&quot;:&quot;鴨長明&quot;,&quot;imageUrl&quot;:&quot;https://one-draw.jp/ijinden/cardlist/001/card/01_038.png&quot;,&quot;expansion&quot;:15,&quot;type&quot;:1,&quot;level&quot;:4,&quot;color&quot;:4,&quot;term&quot;:2,&quot;trait&quot;:0,&quot;legacy&quot;:0,&quot;orderTable&quot;:77,&quot;orderDeck&quot;:126}," calcext:value-type="string">
            <text:p>{"id":"1-38","name":"鴨長明","imageUrl":"https://one-draw.jp/ijinden/cardlist/001/card/01_038.png","expansion":15,"type":1,"level":4,"color":4,"term":2,"trait":0,"legacy":0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79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7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JSON.$A$1];[.$C79];[$JSON.$B$1];[.$E79];[$JSON.$C$1];[.$T79];[$JSON.$D$1];[.$G79];[$JSON.$E$1];[.$I79];[$JSON.$F$1];[.$L79];[$JSON.$G$1];[.$K79];[$JSON.$H$1];[.$O79];[$JSON.$I$1];[.$Q79];[$JSON.$J$1];[.$S79];[$JSON.$K$1];[.$A79];[$JSON.$L$1];[.$B79];[$JSON.$M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level&quot;:4,&quot;color&quot;:4,&quot;term&quot;:0,&quot;trait&quot;:4,&quot;legacy&quot;:0,&quot;orderTable&quot;:78,&quot;orderDeck&quot;:127}," calcext:value-type="string">
            <text:p>{"id":"1-39","name":"ヨハン・ゼバスティアン・バッハ","imageUrl":"https://one-draw.jp/ijinden/cardlist/001/card/01_039.png","expansion":15,"type":1,"level":4,"color":4,"term":0,"trait":4,"legacy":0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JSON.$A$1];[.$C80];[$JSON.$B$1];[.$E80];[$JSON.$C$1];[.$T80];[$JSON.$D$1];[.$G80];[$JSON.$E$1];[.$I80];[$JSON.$F$1];[.$L80];[$JSON.$G$1];[.$K80];[$JSON.$H$1];[.$O80];[$JSON.$I$1];[.$Q80];[$JSON.$J$1];[.$S80];[$JSON.$K$1];[.$A80];[$JSON.$L$1];[.$B80];[$JSON.$M$1])" office:value-type="string" office:string-value="{&quot;id&quot;:&quot;1-40&quot;,&quot;name&quot;:&quot;大伴家持&quot;,&quot;imageUrl&quot;:&quot;https://one-draw.jp/ijinden/cardlist/001/card/01_040.png&quot;,&quot;expansion&quot;:15,&quot;type&quot;:1,&quot;level&quot;:5,&quot;color&quot;:4,&quot;term&quot;:2,&quot;trait&quot;:0,&quot;legacy&quot;:0,&quot;orderTable&quot;:79,&quot;orderDeck&quot;:164}," calcext:value-type="string">
            <text:p>{"id":"1-40","name":"大伴家持","imageUrl":"https://one-draw.jp/ijinden/cardlist/001/card/01_040.png","expansion":15,"type":1,"level":5,"color":4,"term":2,"trait":0,"legacy":0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1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JSON.$A$1];[.$C81];[$JSON.$B$1];[.$E81];[$JSON.$C$1];[.$T81];[$JSON.$D$1];[.$G81];[$JSON.$E$1];[.$I81];[$JSON.$F$1];[.$L81];[$JSON.$G$1];[.$K81];[$JSON.$H$1];[.$O81];[$JSON.$I$1];[.$Q81];[$JSON.$J$1];[.$S81];[$JSON.$K$1];[.$A81];[$JSON.$L$1];[.$B81];[$JSON.$M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level&quot;:5,&quot;color&quot;:4,&quot;term&quot;:0,&quot;trait&quot;:4,&quot;legacy&quot;:0,&quot;orderTable&quot;:80,&quot;orderDeck&quot;:165}," calcext:value-type="string">
            <text:p>{"id":"1-41","name":"フランツ・ペーター・シューベルト","imageUrl":"https://one-draw.jp/ijinden/cardlist/001/card/01_041.png","expansion":15,"type":1,"level":5,"color":4,"term":0,"trait":4,"legacy":0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JSON.$A$1];[.$C82];[$JSON.$B$1];[.$E82];[$JSON.$C$1];[.$T82];[$JSON.$D$1];[.$G82];[$JSON.$E$1];[.$I82];[$JSON.$F$1];[.$L82];[$JSON.$G$1];[.$K82];[$JSON.$H$1];[.$O82];[$JSON.$I$1];[.$Q82];[$JSON.$J$1];[.$S82];[$JSON.$K$1];[.$A82];[$JSON.$L$1];[.$B82];[$JSON.$M$1])" office:value-type="string" office:string-value="{&quot;id&quot;:&quot;1-42&quot;,&quot;name&quot;:&quot;空海&quot;,&quot;imageUrl&quot;:&quot;https://one-draw.jp/ijinden/cardlist/001/card/01_042.png&quot;,&quot;expansion&quot;:15,&quot;type&quot;:1,&quot;level&quot;:6,&quot;color&quot;:4,&quot;term&quot;:1,&quot;trait&quot;:0,&quot;legacy&quot;:1,&quot;orderTable&quot;:81,&quot;orderDeck&quot;:190}," calcext:value-type="string">
            <text:p>{"id":"1-42","name":"空海","imageUrl":"https://one-draw.jp/ijinden/cardlist/001/card/01_042.png","expansion":15,"type":1,"level":6,"color":4,"term":1,"trait":0,"legacy":1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JSON.$A$1];[.$C83];[$JSON.$B$1];[.$E83];[$JSON.$C$1];[.$T83];[$JSON.$D$1];[.$G83];[$JSON.$E$1];[.$I83];[$JSON.$F$1];[.$L83];[$JSON.$G$1];[.$K83];[$JSON.$H$1];[.$O83];[$JSON.$I$1];[.$Q83];[$JSON.$J$1];[.$S83];[$JSON.$K$1];[.$A83];[$JSON.$L$1];[.$B83];[$JSON.$M$1])" office:value-type="string" office:string-value="{&quot;id&quot;:&quot;1-43&quot;,&quot;name&quot;:&quot;清少納言&quot;,&quot;imageUrl&quot;:&quot;https://one-draw.jp/ijinden/cardlist/001/card/01_043.png&quot;,&quot;expansion&quot;:15,&quot;type&quot;:1,&quot;level&quot;:6,&quot;color&quot;:4,&quot;term&quot;:2,&quot;trait&quot;:0,&quot;legacy&quot;:0,&quot;orderTable&quot;:82,&quot;orderDeck&quot;:191}," calcext:value-type="string">
            <text:p>{"id":"1-43","name":"清少納言","imageUrl":"https://one-draw.jp/ijinden/cardlist/001/card/01_043.png","expansion":15,"type":1,"level":6,"color":4,"term":2,"trait":0,"legacy":0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4];[$特性番号.$A$1:$特性番号.$B$8];2;0);0)" office:value-type="float" office:value="4" calcext:value-type="float">
            <text:p>4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JSON.$A$1];[.$C84];[$JSON.$B$1];[.$E84];[$JSON.$C$1];[.$T84];[$JSON.$D$1];[.$G84];[$JSON.$E$1];[.$I84];[$JSON.$F$1];[.$L84];[$JSON.$G$1];[.$K84];[$JSON.$H$1];[.$O84];[$JSON.$I$1];[.$Q84];[$JSON.$J$1];[.$S84];[$JSON.$K$1];[.$A84];[$JSON.$L$1];[.$B84];[$JSON.$M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level&quot;:6,&quot;color&quot;:4,&quot;term&quot;:0,&quot;trait&quot;:4,&quot;legacy&quot;:0,&quot;orderTable&quot;:83,&quot;orderDeck&quot;:192}," calcext:value-type="string">
            <text:p>{"id":"1-44","name":"ルートヴィヒ・ヴァン・ベートーヴェン","imageUrl":"https://one-draw.jp/ijinden/cardlist/001/card/01_044.png","expansion":15,"type":1,"level":6,"color":4,"term":0,"trait":4,"legacy":0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8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JSON.$A$1];[.$C85];[$JSON.$B$1];[.$E85];[$JSON.$C$1];[.$T85];[$JSON.$D$1];[.$G85];[$JSON.$E$1];[.$I85];[$JSON.$F$1];[.$L85];[$JSON.$G$1];[.$K85];[$JSON.$H$1];[.$O85];[$JSON.$I$1];[.$Q85];[$JSON.$J$1];[.$S85];[$JSON.$K$1];[.$A85];[$JSON.$L$1];[.$B85];[$JSON.$M$1])" office:value-type="string" office:string-value="{&quot;id&quot;:&quot;1-45&quot;,&quot;name&quot;:&quot;行基&quot;,&quot;imageUrl&quot;:&quot;https://one-draw.jp/ijinden/cardlist/001/card/01_045.png&quot;,&quot;expansion&quot;:15,&quot;type&quot;:1,&quot;level&quot;:7,&quot;color&quot;:4,&quot;term&quot;:0,&quot;trait&quot;:0,&quot;legacy&quot;:4,&quot;orderTable&quot;:84,&quot;orderDeck&quot;:209}," calcext:value-type="string">
            <text:p>{"id":"1-45","name":"行基","imageUrl":"https://one-draw.jp/ijinden/cardlist/001/card/01_045.png","expansion":15,"type":1,"level":7,"color":4,"term":0,"trait":0,"legacy":4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JSON.$A$1];[.$C86];[$JSON.$B$1];[.$E86];[$JSON.$C$1];[.$T86];[$JSON.$D$1];[.$G86];[$JSON.$E$1];[.$I86];[$JSON.$F$1];[.$L86];[$JSON.$G$1];[.$K86];[$JSON.$H$1];[.$O86];[$JSON.$I$1];[.$Q86];[$JSON.$J$1];[.$S86];[$JSON.$K$1];[.$A86];[$JSON.$L$1];[.$B86];[$JSON.$M$1])" office:value-type="string" office:string-value="{&quot;id&quot;:&quot;1-46&quot;,&quot;name&quot;:&quot;武者の蔵&quot;,&quot;imageUrl&quot;:&quot;https://one-draw.jp/ijinden/cardlist/001/card/01_046.png&quot;,&quot;expansion&quot;:15,&quot;type&quot;:2,&quot;level&quot;:4,&quot;color&quot;:1,&quot;term&quot;:0,&quot;trait&quot;:0,&quot;legacy&quot;:1,&quot;orderTable&quot;:85,&quot;orderDeck&quot;:259}," calcext:value-type="string">
            <text:p>{"id":"1-46","name":"武者の蔵","imageUrl":"https://one-draw.jp/ijinden/cardlist/001/card/01_046.png","expansion":15,"type":2,"level":4,"color":1,"term":0,"trait":0,"legacy":1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87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JSON.$A$1];[.$C87];[$JSON.$B$1];[.$E87];[$JSON.$C$1];[.$T87];[$JSON.$D$1];[.$G87];[$JSON.$E$1];[.$I87];[$JSON.$F$1];[.$L87];[$JSON.$G$1];[.$K87];[$JSON.$H$1];[.$O87];[$JSON.$I$1];[.$Q87];[$JSON.$J$1];[.$S87];[$JSON.$K$1];[.$A87];[$JSON.$L$1];[.$B87];[$JSON.$M$1])" office:value-type="string" office:string-value="{&quot;id&quot;:&quot;1-47&quot;,&quot;name&quot;:&quot;純白の塔&quot;,&quot;imageUrl&quot;:&quot;https://one-draw.jp/ijinden/cardlist/001/card/01_047.png&quot;,&quot;expansion&quot;:15,&quot;type&quot;:2,&quot;level&quot;:4,&quot;color&quot;:2,&quot;term&quot;:0,&quot;trait&quot;:0,&quot;legacy&quot;:5,&quot;orderTable&quot;:86,&quot;orderDeck&quot;:260}," calcext:value-type="string">
            <text:p>{"id":"1-47","name":"純白の塔","imageUrl":"https://one-draw.jp/ijinden/cardlist/001/card/01_047.png","expansion":15,"type":2,"level":4,"color":2,"term":0,"trait":0,"legacy":5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8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JSON.$A$1];[.$C88];[$JSON.$B$1];[.$E88];[$JSON.$C$1];[.$T88];[$JSON.$D$1];[.$G88];[$JSON.$E$1];[.$I88];[$JSON.$F$1];[.$L88];[$JSON.$G$1];[.$K88];[$JSON.$H$1];[.$O88];[$JSON.$I$1];[.$Q88];[$JSON.$J$1];[.$S88];[$JSON.$K$1];[.$A88];[$JSON.$L$1];[.$B88];[$JSON.$M$1])" office:value-type="string" office:string-value="{&quot;id&quot;:&quot;1-48&quot;,&quot;name&quot;:&quot;円形闘技場&quot;,&quot;imageUrl&quot;:&quot;https://one-draw.jp/ijinden/cardlist/001/card/01_048.png&quot;,&quot;expansion&quot;:15,&quot;type&quot;:2,&quot;level&quot;:5,&quot;color&quot;:2,&quot;term&quot;:0,&quot;trait&quot;:0,&quot;legacy&quot;:0,&quot;orderTable&quot;:87,&quot;orderDeck&quot;:267}," calcext:value-type="string">
            <text:p>{"id":"1-48","name":"円形闘技場","imageUrl":"https://one-draw.jp/ijinden/cardlist/001/card/01_048.png","expansion":15,"type":2,"level":5,"color":2,"term":0,"trait":0,"legacy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8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JSON.$A$1];[.$C89];[$JSON.$B$1];[.$E89];[$JSON.$C$1];[.$T89];[$JSON.$D$1];[.$G89];[$JSON.$E$1];[.$I89];[$JSON.$F$1];[.$L89];[$JSON.$G$1];[.$K89];[$JSON.$H$1];[.$O89];[$JSON.$I$1];[.$Q89];[$JSON.$J$1];[.$S89];[$JSON.$K$1];[.$A89];[$JSON.$L$1];[.$B89];[$JSON.$M$1])" office:value-type="string" office:string-value="{&quot;id&quot;:&quot;1-49&quot;,&quot;name&quot;:&quot;巨大古墳&quot;,&quot;imageUrl&quot;:&quot;https://one-draw.jp/ijinden/cardlist/001/card/01_049.png&quot;,&quot;expansion&quot;:15,&quot;type&quot;:2,&quot;level&quot;:2,&quot;color&quot;:4,&quot;term&quot;:0,&quot;trait&quot;:0,&quot;legacy&quot;:1,&quot;orderTable&quot;:88,&quot;orderDeck&quot;:243}," calcext:value-type="string">
            <text:p>{"id":"1-49","name":"巨大古墳","imageUrl":"https://one-draw.jp/ijinden/cardlist/001/card/01_049.png","expansion":15,"type":2,"level":2,"color":4,"term":0,"trait":0,"legacy":1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9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JSON.$A$1];[.$C90];[$JSON.$B$1];[.$E90];[$JSON.$C$1];[.$T90];[$JSON.$D$1];[.$G90];[$JSON.$E$1];[.$I90];[$JSON.$F$1];[.$L90];[$JSON.$G$1];[.$K90];[$JSON.$H$1];[.$O90];[$JSON.$I$1];[.$Q90];[$JSON.$J$1];[.$S90];[$JSON.$K$1];[.$A90];[$JSON.$L$1];[.$B90];[$JSON.$M$1])" office:value-type="string" office:string-value="{&quot;id&quot;:&quot;1-50&quot;,&quot;name&quot;:&quot;魔除けの社&quot;,&quot;imageUrl&quot;:&quot;https://one-draw.jp/ijinden/cardlist/001/card/01_050.png&quot;,&quot;expansion&quot;:15,&quot;type&quot;:2,&quot;level&quot;:3,&quot;color&quot;:4,&quot;term&quot;:0,&quot;trait&quot;:0,&quot;legacy&quot;:1,&quot;orderTable&quot;:89,&quot;orderDeck&quot;:252}," calcext:value-type="string">
            <text:p>{"id":"1-50","name":"魔除けの社","imageUrl":"https://one-draw.jp/ijinden/cardlist/001/card/01_050.png","expansion":15,"type":2,"level":3,"color":4,"term":0,"trait":0,"legacy":1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91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JSON.$A$1];[.$C91];[$JSON.$B$1];[.$E91];[$JSON.$C$1];[.$T91];[$JSON.$D$1];[.$G91];[$JSON.$E$1];[.$I91];[$JSON.$F$1];[.$L91];[$JSON.$G$1];[.$K91];[$JSON.$H$1];[.$O91];[$JSON.$I$1];[.$Q91];[$JSON.$J$1];[.$S91];[$JSON.$K$1];[.$A91];[$JSON.$L$1];[.$B91];[$JSON.$M$1])" office:value-type="string" office:string-value="{&quot;id&quot;:&quot;1-51&quot;,&quot;name&quot;:&quot;冨嶽三十六景&quot;,&quot;imageUrl&quot;:&quot;https://one-draw.jp/ijinden/cardlist/001/card/01_051.png&quot;,&quot;expansion&quot;:15,&quot;type&quot;:2,&quot;level&quot;:5,&quot;color&quot;:4,&quot;term&quot;:0,&quot;trait&quot;:2,&quot;legacy&quot;:0,&quot;orderTable&quot;:90,&quot;orderDeck&quot;:269}," calcext:value-type="string">
            <text:p>{"id":"1-51","name":"冨嶽三十六景","imageUrl":"https://one-draw.jp/ijinden/cardlist/001/card/01_051.png","expansion":15,"type":2,"level":5,"color":4,"term":0,"trait":2,"legacy":0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JSON.$A$1];[.$C92];[$JSON.$B$1];[.$E92];[$JSON.$C$1];[.$T92];[$JSON.$D$1];[.$G92];[$JSON.$E$1];[.$I92];[$JSON.$F$1];[.$L92];[$JSON.$G$1];[.$K92];[$JSON.$H$1];[.$O92];[$JSON.$I$1];[.$Q92];[$JSON.$J$1];[.$S92];[$JSON.$K$1];[.$A92];[$JSON.$L$1];[.$B92];[$JSON.$M$1])" office:value-type="string" office:string-value="{&quot;id&quot;:&quot;1-52&quot;,&quot;name&quot;:&quot;バレット&quot;,&quot;imageUrl&quot;:&quot;https://one-draw.jp/ijinden/cardlist/001/card/01_052.png&quot;,&quot;expansion&quot;:15,&quot;type&quot;:3,&quot;level&quot;:3,&quot;color&quot;:1,&quot;term&quot;:0,&quot;trait&quot;:0,&quot;legacy&quot;:2,&quot;orderTable&quot;:91,&quot;orderDeck&quot;:303}," calcext:value-type="string">
            <text:p>{"id":"1-52","name":"バレット","imageUrl":"https://one-draw.jp/ijinden/cardlist/001/card/01_052.png","expansion":15,"type":3,"level":3,"color":1,"term":0,"trait":0,"legacy":2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JSON.$A$1];[.$C93];[$JSON.$B$1];[.$E93];[$JSON.$C$1];[.$T93];[$JSON.$D$1];[.$G93];[$JSON.$E$1];[.$I93];[$JSON.$F$1];[.$L93];[$JSON.$G$1];[.$K93];[$JSON.$H$1];[.$O93];[$JSON.$I$1];[.$Q93];[$JSON.$J$1];[.$S93];[$JSON.$K$1];[.$A93];[$JSON.$L$1];[.$B93];[$JSON.$M$1])" office:value-type="string" office:string-value="{&quot;id&quot;:&quot;1-53&quot;,&quot;name&quot;:&quot;チャンピオン&quot;,&quot;imageUrl&quot;:&quot;https://one-draw.jp/ijinden/cardlist/001/card/01_053.png&quot;,&quot;expansion&quot;:15,&quot;type&quot;:3,&quot;level&quot;:4,&quot;color&quot;:1,&quot;term&quot;:0,&quot;trait&quot;:0,&quot;legacy&quot;:0,&quot;orderTable&quot;:92,&quot;orderDeck&quot;:318}," calcext:value-type="string">
            <text:p>{"id":"1-53","name":"チャンピオン","imageUrl":"https://one-draw.jp/ijinden/cardlist/001/card/01_053.png","expansion":15,"type":3,"level":4,"color":1,"term":0,"trait":0,"legacy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JSON.$A$1];[.$C94];[$JSON.$B$1];[.$E94];[$JSON.$C$1];[.$T94];[$JSON.$D$1];[.$G94];[$JSON.$E$1];[.$I94];[$JSON.$F$1];[.$L94];[$JSON.$G$1];[.$K94];[$JSON.$H$1];[.$O94];[$JSON.$I$1];[.$Q94];[$JSON.$J$1];[.$S94];[$JSON.$K$1];[.$A94];[$JSON.$L$1];[.$B94];[$JSON.$M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level&quot;:6,&quot;color&quot;:1,&quot;term&quot;:0,&quot;trait&quot;:0,&quot;legacy&quot;:0,&quot;orderTable&quot;:93,&quot;orderDeck&quot;:332}," calcext:value-type="string">
            <text:p>{"id":"1-54","name":"ファイナルアタック","imageUrl":"https://one-draw.jp/ijinden/cardlist/001/card/01_054.png","expansion":15,"type":3,"level":6,"color":1,"term":0,"trait":0,"legacy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JSON.$A$1];[.$C95];[$JSON.$B$1];[.$E95];[$JSON.$C$1];[.$T95];[$JSON.$D$1];[.$G95];[$JSON.$E$1];[.$I95];[$JSON.$F$1];[.$L95];[$JSON.$G$1];[.$K95];[$JSON.$H$1];[.$O95];[$JSON.$I$1];[.$Q95];[$JSON.$J$1];[.$S95];[$JSON.$K$1];[.$A95];[$JSON.$L$1];[.$B95];[$JSON.$M$1])" office:value-type="string" office:string-value="{&quot;id&quot;:&quot;1-55&quot;,&quot;name&quot;:&quot;ストーム&quot;,&quot;imageUrl&quot;:&quot;https://one-draw.jp/ijinden/cardlist/001/card/01_055.png&quot;,&quot;expansion&quot;:15,&quot;type&quot;:3,&quot;level&quot;:2,&quot;color&quot;:2,&quot;term&quot;:0,&quot;trait&quot;:0,&quot;legacy&quot;:2,&quot;orderTable&quot;:94,&quot;orderDeck&quot;:294}," calcext:value-type="string">
            <text:p>{"id":"1-55","name":"ストーム","imageUrl":"https://one-draw.jp/ijinden/cardlist/001/card/01_055.png","expansion":15,"type":3,"level":2,"color":2,"term":0,"trait":0,"legacy":2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JSON.$A$1];[.$C96];[$JSON.$B$1];[.$E96];[$JSON.$C$1];[.$T96];[$JSON.$D$1];[.$G96];[$JSON.$E$1];[.$I96];[$JSON.$F$1];[.$L96];[$JSON.$G$1];[.$K96];[$JSON.$H$1];[.$O96];[$JSON.$I$1];[.$Q96];[$JSON.$J$1];[.$S96];[$JSON.$K$1];[.$A96];[$JSON.$L$1];[.$B96];[$JSON.$M$1])" office:value-type="string" office:string-value="{&quot;id&quot;:&quot;1-56&quot;,&quot;name&quot;:&quot;リバイバル&quot;,&quot;imageUrl&quot;:&quot;https://one-draw.jp/ijinden/cardlist/001/card/01_056.png&quot;,&quot;expansion&quot;:15,&quot;type&quot;:3,&quot;level&quot;:4,&quot;color&quot;:2,&quot;term&quot;:0,&quot;trait&quot;:0,&quot;legacy&quot;:2,&quot;orderTable&quot;:95,&quot;orderDeck&quot;:319}," calcext:value-type="string">
            <text:p>{"id":"1-56","name":"リバイバル","imageUrl":"https://one-draw.jp/ijinden/cardlist/001/card/01_056.png","expansion":15,"type":3,"level":4,"color":2,"term":0,"trait":0,"legacy":2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97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JSON.$A$1];[.$C97];[$JSON.$B$1];[.$E97];[$JSON.$C$1];[.$T97];[$JSON.$D$1];[.$G97];[$JSON.$E$1];[.$I97];[$JSON.$F$1];[.$L97];[$JSON.$G$1];[.$K97];[$JSON.$H$1];[.$O97];[$JSON.$I$1];[.$Q97];[$JSON.$J$1];[.$S97];[$JSON.$K$1];[.$A97];[$JSON.$L$1];[.$B97];[$JSON.$M$1])" office:value-type="string" office:string-value="{&quot;id&quot;:&quot;1-57&quot;,&quot;name&quot;:&quot;エイジング&quot;,&quot;imageUrl&quot;:&quot;https://one-draw.jp/ijinden/cardlist/001/card/01_057.png&quot;,&quot;expansion&quot;:15,&quot;type&quot;:3,&quot;level&quot;:4,&quot;color&quot;:4,&quot;term&quot;:0,&quot;trait&quot;:0,&quot;legacy&quot;:2,&quot;orderTable&quot;:96,&quot;orderDeck&quot;:321}," calcext:value-type="string">
            <text:p>{"id":"1-57","name":"エイジング","imageUrl":"https://one-draw.jp/ijinden/cardlist/001/card/01_057.png","expansion":15,"type":3,"level":4,"color":4,"term":0,"trait":0,"legacy":2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JSON.$A$1];[.$C98];[$JSON.$B$1];[.$E98];[$JSON.$C$1];[.$T98];[$JSON.$D$1];[.$G98];[$JSON.$E$1];[.$I98];[$JSON.$F$1];[.$L98];[$JSON.$G$1];[.$K98];[$JSON.$H$1];[.$O98];[$JSON.$I$1];[.$Q98];[$JSON.$J$1];[.$S98];[$JSON.$K$1];[.$A98];[$JSON.$L$1];[.$B98];[$JSON.$M$1])" office:value-type="string" office:string-value="{&quot;id&quot;:&quot;1-58&quot;,&quot;name&quot;:&quot;カンテラ&quot;,&quot;imageUrl&quot;:&quot;https://one-draw.jp/ijinden/cardlist/001/card/01_058.png&quot;,&quot;expansion&quot;:15,&quot;type&quot;:4,&quot;level&quot;:1,&quot;color&quot;:1,&quot;term&quot;:0,&quot;trait&quot;:0,&quot;legacy&quot;:0,&quot;orderTable&quot;:97,&quot;orderDeck&quot;:344}," calcext:value-type="string">
            <text:p>{"id":"1-58","name":"カンテラ","imageUrl":"https://one-draw.jp/ijinden/cardlist/001/card/01_058.png","expansion":15,"type":4,"level":1,"color":1,"term":0,"trait":0,"legacy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9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JSON.$A$1];[.$C99];[$JSON.$B$1];[.$E99];[$JSON.$C$1];[.$T99];[$JSON.$D$1];[.$G99];[$JSON.$E$1];[.$I99];[$JSON.$F$1];[.$L99];[$JSON.$G$1];[.$K99];[$JSON.$H$1];[.$O99];[$JSON.$I$1];[.$Q99];[$JSON.$J$1];[.$S99];[$JSON.$K$1];[.$A99];[$JSON.$L$1];[.$B99];[$JSON.$M$1])" office:value-type="string" office:string-value="{&quot;id&quot;:&quot;1-59&quot;,&quot;name&quot;:&quot;ファイアソード&quot;,&quot;imageUrl&quot;:&quot;https://one-draw.jp/ijinden/cardlist/001/card/01_059.png&quot;,&quot;expansion&quot;:15,&quot;type&quot;:4,&quot;level&quot;:1,&quot;color&quot;:1,&quot;term&quot;:0,&quot;trait&quot;:0,&quot;legacy&quot;:0,&quot;orderTable&quot;:98,&quot;orderDeck&quot;:345}," calcext:value-type="string">
            <text:p>{"id":"1-59","name":"ファイアソード","imageUrl":"https://one-draw.jp/ijinden/cardlist/001/card/01_059.png","expansion":15,"type":4,"level":1,"color":1,"term":0,"trait":0,"legacy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JSON.$A$1];[.$C100];[$JSON.$B$1];[.$E100];[$JSON.$C$1];[.$T100];[$JSON.$D$1];[.$G100];[$JSON.$E$1];[.$I100];[$JSON.$F$1];[.$L100];[$JSON.$G$1];[.$K100];[$JSON.$H$1];[.$O100];[$JSON.$I$1];[.$Q100];[$JSON.$J$1];[.$S100];[$JSON.$K$1];[.$A100];[$JSON.$L$1];[.$B100];[$JSON.$M$1])" office:value-type="string" office:string-value="{&quot;id&quot;:&quot;1-60&quot;,&quot;name&quot;:&quot;髭切&quot;,&quot;imageUrl&quot;:&quot;https://one-draw.jp/ijinden/cardlist/001/card/01_060.png&quot;,&quot;expansion&quot;:15,&quot;type&quot;:4,&quot;level&quot;:1,&quot;color&quot;:1,&quot;term&quot;:0,&quot;trait&quot;:0,&quot;legacy&quot;:3,&quot;orderTable&quot;:99,&quot;orderDeck&quot;:346}," calcext:value-type="string">
            <text:p>{"id":"1-60","name":"髭切","imageUrl":"https://one-draw.jp/ijinden/cardlist/001/card/01_060.png","expansion":15,"type":4,"level":1,"color":1,"term":0,"trait":0,"legacy":3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JSON.$A$1];[.$C101];[$JSON.$B$1];[.$E101];[$JSON.$C$1];[.$T101];[$JSON.$D$1];[.$G101];[$JSON.$E$1];[.$I101];[$JSON.$F$1];[.$L101];[$JSON.$G$1];[.$K101];[$JSON.$H$1];[.$O101];[$JSON.$I$1];[.$Q101];[$JSON.$J$1];[.$S101];[$JSON.$K$1];[.$A101];[$JSON.$L$1];[.$B101];[$JSON.$M$1])" office:value-type="string" office:string-value="{&quot;id&quot;:&quot;1-61&quot;,&quot;name&quot;:&quot;レッドオーブ&quot;,&quot;imageUrl&quot;:&quot;https://one-draw.jp/ijinden/cardlist/001/card/01_061.png&quot;,&quot;expansion&quot;:15,&quot;type&quot;:4,&quot;level&quot;:2,&quot;color&quot;:1,&quot;term&quot;:0,&quot;trait&quot;:0,&quot;legacy&quot;:3,&quot;orderTable&quot;:100,&quot;orderDeck&quot;:379}," calcext:value-type="string">
            <text:p>{"id":"1-61","name":"レッドオーブ","imageUrl":"https://one-draw.jp/ijinden/cardlist/001/card/01_061.png","expansion":15,"type":4,"level":2,"color":1,"term":0,"trait":0,"legacy":3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JSON.$A$1];[.$C102];[$JSON.$B$1];[.$E102];[$JSON.$C$1];[.$T102];[$JSON.$D$1];[.$G102];[$JSON.$E$1];[.$I102];[$JSON.$F$1];[.$L102];[$JSON.$G$1];[.$K102];[$JSON.$H$1];[.$O102];[$JSON.$I$1];[.$Q102];[$JSON.$J$1];[.$S102];[$JSON.$K$1];[.$A102];[$JSON.$L$1];[.$B102];[$JSON.$M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level&quot;:1,&quot;color&quot;:2,&quot;term&quot;:0,&quot;trait&quot;:0,&quot;legacy&quot;:0,&quot;orderTable&quot;:101,&quot;orderDeck&quot;:350}," calcext:value-type="string">
            <text:p>{"id":"1-62","name":"ウォーターポット","imageUrl":"https://one-draw.jp/ijinden/cardlist/001/card/01_062.png","expansion":15,"type":4,"level":1,"color":2,"term":0,"trait":0,"legacy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JSON.$A$1];[.$C103];[$JSON.$B$1];[.$E103];[$JSON.$C$1];[.$T103];[$JSON.$D$1];[.$G103];[$JSON.$E$1];[.$I103];[$JSON.$F$1];[.$L103];[$JSON.$G$1];[.$K103];[$JSON.$H$1];[.$O103];[$JSON.$I$1];[.$Q103];[$JSON.$J$1];[.$S103];[$JSON.$K$1];[.$A103];[$JSON.$L$1];[.$B103];[$JSON.$M$1])" office:value-type="string" office:string-value="{&quot;id&quot;:&quot;1-63&quot;,&quot;name&quot;:&quot;アイスソード&quot;,&quot;imageUrl&quot;:&quot;https://one-draw.jp/ijinden/cardlist/001/card/01_063.png&quot;,&quot;expansion&quot;:15,&quot;type&quot;:4,&quot;level&quot;:1,&quot;color&quot;:2,&quot;term&quot;:0,&quot;trait&quot;:0,&quot;legacy&quot;:0,&quot;orderTable&quot;:102,&quot;orderDeck&quot;:351}," calcext:value-type="string">
            <text:p>{"id":"1-63","name":"アイスソード","imageUrl":"https://one-draw.jp/ijinden/cardlist/001/card/01_063.png","expansion":15,"type":4,"level":1,"color":2,"term":0,"trait":0,"legacy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4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JSON.$A$1];[.$C104];[$JSON.$B$1];[.$E104];[$JSON.$C$1];[.$T104];[$JSON.$D$1];[.$G104];[$JSON.$E$1];[.$I104];[$JSON.$F$1];[.$L104];[$JSON.$G$1];[.$K104];[$JSON.$H$1];[.$O104];[$JSON.$I$1];[.$Q104];[$JSON.$J$1];[.$S104];[$JSON.$K$1];[.$A104];[$JSON.$L$1];[.$B104];[$JSON.$M$1])" office:value-type="string" office:string-value="{&quot;id&quot;:&quot;1-64&quot;,&quot;name&quot;:&quot;羅針盤&quot;,&quot;imageUrl&quot;:&quot;https://one-draw.jp/ijinden/cardlist/001/card/01_064.png&quot;,&quot;expansion&quot;:15,&quot;type&quot;:4,&quot;level&quot;:1,&quot;color&quot;:2,&quot;term&quot;:0,&quot;trait&quot;:0,&quot;legacy&quot;:3,&quot;orderTable&quot;:103,&quot;orderDeck&quot;:352}," calcext:value-type="string">
            <text:p>{"id":"1-64","name":"羅針盤","imageUrl":"https://one-draw.jp/ijinden/cardlist/001/card/01_064.png","expansion":15,"type":4,"level":1,"color":2,"term":0,"trait":0,"legacy":3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5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JSON.$A$1];[.$C105];[$JSON.$B$1];[.$E105];[$JSON.$C$1];[.$T105];[$JSON.$D$1];[.$G105];[$JSON.$E$1];[.$I105];[$JSON.$F$1];[.$L105];[$JSON.$G$1];[.$K105];[$JSON.$H$1];[.$O105];[$JSON.$I$1];[.$Q105];[$JSON.$J$1];[.$S105];[$JSON.$K$1];[.$A105];[$JSON.$L$1];[.$B105];[$JSON.$M$1])" office:value-type="string" office:string-value="{&quot;id&quot;:&quot;1-65&quot;,&quot;name&quot;:&quot;ブルーオーブ&quot;,&quot;imageUrl&quot;:&quot;https://one-draw.jp/ijinden/cardlist/001/card/01_065.png&quot;,&quot;expansion&quot;:15,&quot;type&quot;:4,&quot;level&quot;:2,&quot;color&quot;:2,&quot;term&quot;:0,&quot;trait&quot;:0,&quot;legacy&quot;:3,&quot;orderTable&quot;:104,&quot;orderDeck&quot;:380}," calcext:value-type="string">
            <text:p>{"id":"1-65","name":"ブルーオーブ","imageUrl":"https://one-draw.jp/ijinden/cardlist/001/card/01_065.png","expansion":15,"type":4,"level":2,"color":2,"term":0,"trait":0,"legacy":3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JSON.$A$1];[.$C106];[$JSON.$B$1];[.$E106];[$JSON.$C$1];[.$T106];[$JSON.$D$1];[.$G106];[$JSON.$E$1];[.$I106];[$JSON.$F$1];[.$L106];[$JSON.$G$1];[.$K106];[$JSON.$H$1];[.$O106];[$JSON.$I$1];[.$Q106];[$JSON.$J$1];[.$S106];[$JSON.$K$1];[.$A106];[$JSON.$L$1];[.$B106];[$JSON.$M$1])" office:value-type="string" office:string-value="{&quot;id&quot;:&quot;1-66&quot;,&quot;name&quot;:&quot;ポプリ&quot;,&quot;imageUrl&quot;:&quot;https://one-draw.jp/ijinden/cardlist/001/card/01_066.png&quot;,&quot;expansion&quot;:15,&quot;type&quot;:4,&quot;level&quot;:1,&quot;color&quot;:4,&quot;term&quot;:0,&quot;trait&quot;:0,&quot;legacy&quot;:0,&quot;orderTable&quot;:105,&quot;orderDeck&quot;:356}," calcext:value-type="string">
            <text:p>{"id":"1-66","name":"ポプリ","imageUrl":"https://one-draw.jp/ijinden/cardlist/001/card/01_066.png","expansion":15,"type":4,"level":1,"color":4,"term":0,"trait":0,"legacy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0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JSON.$A$1];[.$C107];[$JSON.$B$1];[.$E107];[$JSON.$C$1];[.$T107];[$JSON.$D$1];[.$G107];[$JSON.$E$1];[.$I107];[$JSON.$F$1];[.$L107];[$JSON.$G$1];[.$K107];[$JSON.$H$1];[.$O107];[$JSON.$I$1];[.$Q107];[$JSON.$J$1];[.$S107];[$JSON.$K$1];[.$A107];[$JSON.$L$1];[.$B107];[$JSON.$M$1])" office:value-type="string" office:string-value="{&quot;id&quot;:&quot;1-67&quot;,&quot;name&quot;:&quot;ウッドスタッフ&quot;,&quot;imageUrl&quot;:&quot;https://one-draw.jp/ijinden/cardlist/001/card/01_067.png&quot;,&quot;expansion&quot;:15,&quot;type&quot;:4,&quot;level&quot;:1,&quot;color&quot;:4,&quot;term&quot;:0,&quot;trait&quot;:0,&quot;legacy&quot;:0,&quot;orderTable&quot;:106,&quot;orderDeck&quot;:357}," calcext:value-type="string">
            <text:p>{"id":"1-67","name":"ウッドスタッフ","imageUrl":"https://one-draw.jp/ijinden/cardlist/001/card/01_067.png","expansion":15,"type":4,"level":1,"color":4,"term":0,"trait":0,"legacy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JSON.$A$1];[.$C108];[$JSON.$B$1];[.$E108];[$JSON.$C$1];[.$T108];[$JSON.$D$1];[.$G108];[$JSON.$E$1];[.$I108];[$JSON.$F$1];[.$L108];[$JSON.$G$1];[.$K108];[$JSON.$H$1];[.$O108];[$JSON.$I$1];[.$Q108];[$JSON.$J$1];[.$S108];[$JSON.$K$1];[.$A108];[$JSON.$L$1];[.$B108];[$JSON.$M$1])" office:value-type="string" office:string-value="{&quot;id&quot;:&quot;1-68&quot;,&quot;name&quot;:&quot;万葉集&quot;,&quot;imageUrl&quot;:&quot;https://one-draw.jp/ijinden/cardlist/001/card/01_068.png&quot;,&quot;expansion&quot;:15,&quot;type&quot;:4,&quot;level&quot;:1,&quot;color&quot;:4,&quot;term&quot;:0,&quot;trait&quot;:0,&quot;legacy&quot;:3,&quot;orderTable&quot;:107,&quot;orderDeck&quot;:358}," calcext:value-type="string">
            <text:p>{"id":"1-68","name":"万葉集","imageUrl":"https://one-draw.jp/ijinden/cardlist/001/card/01_068.png","expansion":15,"type":4,"level":1,"color":4,"term":0,"trait":0,"legacy":3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0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JSON.$A$1];[.$C109];[$JSON.$B$1];[.$E109];[$JSON.$C$1];[.$T109];[$JSON.$D$1];[.$G109];[$JSON.$E$1];[.$I109];[$JSON.$F$1];[.$L109];[$JSON.$G$1];[.$K109];[$JSON.$H$1];[.$O109];[$JSON.$I$1];[.$Q109];[$JSON.$J$1];[.$S109];[$JSON.$K$1];[.$A109];[$JSON.$L$1];[.$B109];[$JSON.$M$1])" office:value-type="string" office:string-value="{&quot;id&quot;:&quot;1-69&quot;,&quot;name&quot;:&quot;グリーンオーブ&quot;,&quot;imageUrl&quot;:&quot;https://one-draw.jp/ijinden/cardlist/001/card/01_069.png&quot;,&quot;expansion&quot;:15,&quot;type&quot;:4,&quot;level&quot;:2,&quot;color&quot;:4,&quot;term&quot;:0,&quot;trait&quot;:0,&quot;legacy&quot;:3,&quot;orderTable&quot;:108,&quot;orderDeck&quot;:381}," calcext:value-type="string">
            <text:p>{"id":"1-69","name":"グリーンオーブ","imageUrl":"https://one-draw.jp/ijinden/cardlist/001/card/01_069.png","expansion":15,"type":4,"level":2,"color":4,"term":0,"trait":0,"legacy":3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JSON.$A$1];[.$C110];[$JSON.$B$1];[.$E110];[$JSON.$C$1];[.$T110];[$JSON.$D$1];[.$G110];[$JSON.$E$1];[.$I110];[$JSON.$F$1];[.$L110];[$JSON.$G$1];[.$K110];[$JSON.$H$1];[.$O110];[$JSON.$I$1];[.$Q110];[$JSON.$J$1];[.$S110];[$JSON.$K$1];[.$A110];[$JSON.$L$1];[.$B110];[$JSON.$M$1])" office:value-type="string" office:string-value="{&quot;id&quot;:&quot;1-70&quot;,&quot;name&quot;:&quot;ビスマルク&quot;,&quot;imageUrl&quot;:&quot;https://one-draw.jp/ijinden/cardlist/001/card/01_070.png&quot;,&quot;expansion&quot;:15,&quot;type&quot;:1,&quot;level&quot;:3,&quot;color&quot;:1,&quot;term&quot;:0,&quot;trait&quot;:0,&quot;legacy&quot;:0,&quot;orderTable&quot;:109,&quot;orderDeck&quot;:68}," calcext:value-type="string">
            <text:p>{"id":"1-70","name":"ビスマルク","imageUrl":"https://one-draw.jp/ijinden/cardlist/001/card/01_070.png","expansion":15,"type":1,"level":3,"color":1,"term":0,"trait":0,"legacy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JSON.$A$1];[.$C111];[$JSON.$B$1];[.$E111];[$JSON.$C$1];[.$T111];[$JSON.$D$1];[.$G111];[$JSON.$E$1];[.$I111];[$JSON.$F$1];[.$L111];[$JSON.$G$1];[.$K111];[$JSON.$H$1];[.$O111];[$JSON.$I$1];[.$Q111];[$JSON.$J$1];[.$S111];[$JSON.$K$1];[.$A111];[$JSON.$L$1];[.$B111];[$JSON.$M$1])" office:value-type="string" office:string-value="{&quot;id&quot;:&quot;1-71&quot;,&quot;name&quot;:&quot;ミュンツァー&quot;,&quot;imageUrl&quot;:&quot;https://one-draw.jp/ijinden/cardlist/001/card/01_071.png&quot;,&quot;expansion&quot;:15,&quot;type&quot;:1,&quot;level&quot;:1,&quot;color&quot;:1,&quot;term&quot;:0,&quot;trait&quot;:0,&quot;legacy&quot;:4,&quot;orderTable&quot;:110,&quot;orderDeck&quot;:3}," calcext:value-type="string">
            <text:p>{"id":"1-71","name":"ミュンツァー","imageUrl":"https://one-draw.jp/ijinden/cardlist/001/card/01_071.png","expansion":15,"type":1,"level":1,"color":1,"term":0,"trait":0,"legacy":4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JSON.$A$1];[.$C112];[$JSON.$B$1];[.$E112];[$JSON.$C$1];[.$T112];[$JSON.$D$1];[.$G112];[$JSON.$E$1];[.$I112];[$JSON.$F$1];[.$L112];[$JSON.$G$1];[.$K112];[$JSON.$H$1];[.$O112];[$JSON.$I$1];[.$Q112];[$JSON.$J$1];[.$S112];[$JSON.$K$1];[.$A112];[$JSON.$L$1];[.$B112];[$JSON.$M$1])" office:value-type="string" office:string-value="{&quot;id&quot;:&quot;1-72&quot;,&quot;name&quot;:&quot;大江広元&quot;,&quot;imageUrl&quot;:&quot;https://one-draw.jp/ijinden/cardlist/001/card/01_072.png&quot;,&quot;expansion&quot;:15,&quot;type&quot;:1,&quot;level&quot;:2,&quot;color&quot;:1,&quot;term&quot;:0,&quot;trait&quot;:0,&quot;legacy&quot;:4,&quot;orderTable&quot;:111,&quot;orderDeck&quot;:27}," calcext:value-type="string">
            <text:p>{"id":"1-72","name":"大江広元","imageUrl":"https://one-draw.jp/ijinden/cardlist/001/card/01_072.png","expansion":15,"type":1,"level":2,"color":1,"term":0,"trait":0,"legacy":4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JSON.$A$1];[.$C113];[$JSON.$B$1];[.$E113];[$JSON.$C$1];[.$T113];[$JSON.$D$1];[.$G113];[$JSON.$E$1];[.$I113];[$JSON.$F$1];[.$L113];[$JSON.$G$1];[.$K113];[$JSON.$H$1];[.$O113];[$JSON.$I$1];[.$Q113];[$JSON.$J$1];[.$S113];[$JSON.$K$1];[.$A113];[$JSON.$L$1];[.$B113];[$JSON.$M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level&quot;:4,&quot;color&quot;:2,&quot;term&quot;:0,&quot;trait&quot;:0,&quot;legacy&quot;:4,&quot;orderTable&quot;:112,&quot;orderDeck&quot;:117}," calcext:value-type="string">
            <text:p>{"id":"1-73","name":"グスタフ2世アドルフ","imageUrl":"https://one-draw.jp/ijinden/cardlist/001/card/01_073.png","expansion":15,"type":1,"level":4,"color":2,"term":0,"trait":0,"legacy":4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JSON.$A$1];[.$C114];[$JSON.$B$1];[.$E114];[$JSON.$C$1];[.$T114];[$JSON.$D$1];[.$G114];[$JSON.$E$1];[.$I114];[$JSON.$F$1];[.$L114];[$JSON.$G$1];[.$K114];[$JSON.$H$1];[.$O114];[$JSON.$I$1];[.$Q114];[$JSON.$J$1];[.$S114];[$JSON.$K$1];[.$A114];[$JSON.$L$1];[.$B114];[$JSON.$M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level&quot;:4,&quot;color&quot;:2,&quot;term&quot;:0,&quot;trait&quot;:0,&quot;legacy&quot;:0,&quot;orderTable&quot;:113,&quot;orderDeck&quot;:118}," calcext:value-type="string">
            <text:p>{"id":"1-74","name":"オリバー・クロムウェル","imageUrl":"https://one-draw.jp/ijinden/cardlist/001/card/01_074.png","expansion":15,"type":1,"level":4,"color":2,"term":0,"trait":0,"legacy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JSON.$A$1];[.$C115];[$JSON.$B$1];[.$E115];[$JSON.$C$1];[.$T115];[$JSON.$D$1];[.$G115];[$JSON.$E$1];[.$I115];[$JSON.$F$1];[.$L115];[$JSON.$G$1];[.$K115];[$JSON.$H$1];[.$O115];[$JSON.$I$1];[.$Q115];[$JSON.$J$1];[.$S115];[$JSON.$K$1];[.$A115];[$JSON.$L$1];[.$B115];[$JSON.$M$1])" office:value-type="string" office:string-value="{&quot;id&quot;:&quot;1-75&quot;,&quot;name&quot;:&quot;衛青&quot;,&quot;imageUrl&quot;:&quot;https://one-draw.jp/ijinden/cardlist/001/card/01_075.png&quot;,&quot;expansion&quot;:15,&quot;type&quot;:1,&quot;level&quot;:4,&quot;color&quot;:2,&quot;term&quot;:0,&quot;trait&quot;:0,&quot;legacy&quot;:4,&quot;orderTable&quot;:114,&quot;orderDeck&quot;:119}," calcext:value-type="string">
            <text:p>{"id":"1-75","name":"衛青","imageUrl":"https://one-draw.jp/ijinden/cardlist/001/card/01_075.png","expansion":15,"type":1,"level":4,"color":2,"term":0,"trait":0,"legacy":4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JSON.$A$1];[.$C116];[$JSON.$B$1];[.$E116];[$JSON.$C$1];[.$T116];[$JSON.$D$1];[.$G116];[$JSON.$E$1];[.$I116];[$JSON.$F$1];[.$L116];[$JSON.$G$1];[.$K116];[$JSON.$H$1];[.$O116];[$JSON.$I$1];[.$Q116];[$JSON.$J$1];[.$S116];[$JSON.$K$1];[.$A116];[$JSON.$L$1];[.$B116];[$JSON.$M$1])" office:value-type="string" office:string-value="{&quot;id&quot;:&quot;1-76&quot;,&quot;name&quot;:&quot;シーボルト&quot;,&quot;imageUrl&quot;:&quot;https://one-draw.jp/ijinden/cardlist/001/card/01_076.png&quot;,&quot;expansion&quot;:15,&quot;type&quot;:1,&quot;level&quot;:5,&quot;color&quot;:4,&quot;term&quot;:0,&quot;trait&quot;:0,&quot;legacy&quot;:0,&quot;orderTable&quot;:115,&quot;orderDeck&quot;:166}," calcext:value-type="string">
            <text:p>{"id":"1-76","name":"シーボルト","imageUrl":"https://one-draw.jp/ijinden/cardlist/001/card/01_076.png","expansion":15,"type":1,"level":5,"color":4,"term":0,"trait":0,"legacy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JSON.$A$1];[.$C117];[$JSON.$B$1];[.$E117];[$JSON.$C$1];[.$T117];[$JSON.$D$1];[.$G117];[$JSON.$E$1];[.$I117];[$JSON.$F$1];[.$L117];[$JSON.$G$1];[.$K117];[$JSON.$H$1];[.$O117];[$JSON.$I$1];[.$Q117];[$JSON.$J$1];[.$S117];[$JSON.$K$1];[.$A117];[$JSON.$L$1];[.$B117];[$JSON.$M$1])" office:value-type="string" office:string-value="{&quot;id&quot;:&quot;1-77&quot;,&quot;name&quot;:&quot;乾隆帝&quot;,&quot;imageUrl&quot;:&quot;https://one-draw.jp/ijinden/cardlist/001/card/01_077.png&quot;,&quot;expansion&quot;:15,&quot;type&quot;:1,&quot;level&quot;:2,&quot;color&quot;:4,&quot;term&quot;:0,&quot;trait&quot;:0,&quot;legacy&quot;:0,&quot;orderTable&quot;:116,&quot;orderDeck&quot;:46}," calcext:value-type="string">
            <text:p>{"id":"1-77","name":"乾隆帝","imageUrl":"https://one-draw.jp/ijinden/cardlist/001/card/01_077.png","expansion":15,"type":1,"level":2,"color":4,"term":0,"trait":0,"legacy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1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JSON.$A$1];[.$C118];[$JSON.$B$1];[.$E118];[$JSON.$C$1];[.$T118];[$JSON.$D$1];[.$G118];[$JSON.$E$1];[.$I118];[$JSON.$F$1];[.$L118];[$JSON.$G$1];[.$K118];[$JSON.$H$1];[.$O118];[$JSON.$I$1];[.$Q118];[$JSON.$J$1];[.$S118];[$JSON.$K$1];[.$A118];[$JSON.$L$1];[.$B118];[$JSON.$M$1])" office:value-type="string" office:string-value="{&quot;id&quot;:&quot;1-78&quot;,&quot;name&quot;:&quot;小野好古&quot;,&quot;imageUrl&quot;:&quot;https://one-draw.jp/ijinden/cardlist/001/card/01_078.png&quot;,&quot;expansion&quot;:15,&quot;type&quot;:1,&quot;level&quot;:3,&quot;color&quot;:4,&quot;term&quot;:0,&quot;trait&quot;:0,&quot;legacy&quot;:4,&quot;orderTable&quot;:117,&quot;orderDeck&quot;:88}," calcext:value-type="string">
            <text:p>{"id":"1-78","name":"小野好古","imageUrl":"https://one-draw.jp/ijinden/cardlist/001/card/01_078.png","expansion":15,"type":1,"level":3,"color":4,"term":0,"trait":0,"legacy":4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JSON.$A$1];[.$C119];[$JSON.$B$1];[.$E119];[$JSON.$C$1];[.$T119];[$JSON.$D$1];[.$G119];[$JSON.$E$1];[.$I119];[$JSON.$F$1];[.$L119];[$JSON.$G$1];[.$K119];[$JSON.$H$1];[.$O119];[$JSON.$I$1];[.$Q119];[$JSON.$J$1];[.$S119];[$JSON.$K$1];[.$A119];[$JSON.$L$1];[.$B119];[$JSON.$M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level&quot;:5,&quot;color&quot;:4,&quot;term&quot;:1,&quot;trait&quot;:0,&quot;legacy&quot;:0,&quot;orderTable&quot;:118,&quot;orderDeck&quot;:167}," calcext:value-type="string">
            <text:p>{"id":"1-79","name":"アレッサンドロ・ヴァリニャーノ","imageUrl":"https://one-draw.jp/ijinden/cardlist/001/card/01_079.png","expansion":15,"type":1,"level":5,"color":4,"term":1,"trait":0,"legacy":0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JSON.$A$1];[.$C120];[$JSON.$B$1];[.$E120];[$JSON.$C$1];[.$T120];[$JSON.$D$1];[.$G120];[$JSON.$E$1];[.$I120];[$JSON.$F$1];[.$L120];[$JSON.$G$1];[.$K120];[$JSON.$H$1];[.$O120];[$JSON.$I$1];[.$Q120];[$JSON.$J$1];[.$S120];[$JSON.$K$1];[.$A120];[$JSON.$L$1];[.$B120];[$JSON.$M$1])" office:value-type="string" office:string-value="{&quot;id&quot;:&quot;1-80&quot;,&quot;name&quot;:&quot;角倉了以&quot;,&quot;imageUrl&quot;:&quot;https://one-draw.jp/ijinden/cardlist/001/card/01_080.png&quot;,&quot;expansion&quot;:15,&quot;type&quot;:1,&quot;level&quot;:6,&quot;color&quot;:4,&quot;term&quot;:0,&quot;trait&quot;:0,&quot;legacy&quot;:0,&quot;orderTable&quot;:119,&quot;orderDeck&quot;:193}," calcext:value-type="string">
            <text:p>{"id":"1-80","name":"角倉了以","imageUrl":"https://one-draw.jp/ijinden/cardlist/001/card/01_080.png","expansion":15,"type":1,"level":6,"color":4,"term":0,"trait":0,"legacy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21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JSON.$A$1];[.$C121];[$JSON.$B$1];[.$E121];[$JSON.$C$1];[.$T121];[$JSON.$D$1];[.$G121];[$JSON.$E$1];[.$I121];[$JSON.$F$1];[.$L121];[$JSON.$G$1];[.$K121];[$JSON.$H$1];[.$O121];[$JSON.$I$1];[.$Q121];[$JSON.$J$1];[.$S121];[$JSON.$K$1];[.$A121];[$JSON.$L$1];[.$B121];[$JSON.$M$1])" office:value-type="string" office:string-value="{&quot;id&quot;:&quot;Y-1&quot;,&quot;name&quot;:&quot;諸葛亮&quot;,&quot;imageUrl&quot;:&quot;https://one-draw.jp/ijinden/cardlist/Y01/card/02_Y_001.png&quot;,&quot;expansion&quot;:20,&quot;type&quot;:1,&quot;level&quot;:6,&quot;color&quot;:8,&quot;term&quot;:0,&quot;trait&quot;:0,&quot;legacy&quot;:6,&quot;orderTable&quot;:120,&quot;orderDeck&quot;:196}," calcext:value-type="string">
            <text:p>{"id":"Y-1","name":"諸葛亮","imageUrl":"https://one-draw.jp/ijinden/cardlist/Y01/card/02_Y_001.png","expansion":20,"type":1,"level":6,"color":8,"term":0,"trait":0,"legacy":6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22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2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JSON.$A$1];[.$C122];[$JSON.$B$1];[.$E122];[$JSON.$C$1];[.$T122];[$JSON.$D$1];[.$G122];[$JSON.$E$1];[.$I122];[$JSON.$F$1];[.$L122];[$JSON.$G$1];[.$K122];[$JSON.$H$1];[.$O122];[$JSON.$I$1];[.$Q122];[$JSON.$J$1];[.$S122];[$JSON.$K$1];[.$A122];[$JSON.$L$1];[.$B122];[$JSON.$M$1])" office:value-type="string" office:string-value="{&quot;id&quot;:&quot;Y-2&quot;,&quot;name&quot;:&quot;今川義元&quot;,&quot;imageUrl&quot;:&quot;https://one-draw.jp/ijinden/cardlist/Y01/card/02_Y_002.png&quot;,&quot;expansion&quot;:20,&quot;type&quot;:1,&quot;level&quot;:2,&quot;color&quot;:8,&quot;term&quot;:0,&quot;trait&quot;:1,&quot;legacy&quot;:4,&quot;orderTable&quot;:121,&quot;orderDeck&quot;:52}," calcext:value-type="string">
            <text:p>{"id":"Y-2","name":"今川義元","imageUrl":"https://one-draw.jp/ijinden/cardlist/Y01/card/02_Y_002.png","expansion":20,"type":1,"level":2,"color":8,"term":0,"trait":1,"legacy":4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2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JSON.$A$1];[.$C123];[$JSON.$B$1];[.$E123];[$JSON.$C$1];[.$T123];[$JSON.$D$1];[.$G123];[$JSON.$E$1];[.$I123];[$JSON.$F$1];[.$L123];[$JSON.$G$1];[.$K123];[$JSON.$H$1];[.$O123];[$JSON.$I$1];[.$Q123];[$JSON.$J$1];[.$S123];[$JSON.$K$1];[.$A123];[$JSON.$L$1];[.$B123];[$JSON.$M$1])" office:value-type="string" office:string-value="{&quot;id&quot;:&quot;Y-3&quot;,&quot;name&quot;:&quot;周瑜&quot;,&quot;imageUrl&quot;:&quot;https://one-draw.jp/ijinden/cardlist/Y01/card/02_Y_003.png&quot;,&quot;expansion&quot;:20,&quot;type&quot;:1,&quot;level&quot;:4,&quot;color&quot;:8,&quot;term&quot;:0,&quot;trait&quot;:0,&quot;legacy&quot;:1,&quot;orderTable&quot;:122,&quot;orderDeck&quot;:132}," calcext:value-type="string">
            <text:p>{"id":"Y-3","name":"周瑜","imageUrl":"https://one-draw.jp/ijinden/cardlist/Y01/card/02_Y_003.png","expansion":20,"type":1,"level":4,"color":8,"term":0,"trait":0,"legacy":1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JSON.$A$1];[.$C124];[$JSON.$B$1];[.$E124];[$JSON.$C$1];[.$T124];[$JSON.$D$1];[.$G124];[$JSON.$E$1];[.$I124];[$JSON.$F$1];[.$L124];[$JSON.$G$1];[.$K124];[$JSON.$H$1];[.$O124];[$JSON.$I$1];[.$Q124];[$JSON.$J$1];[.$S124];[$JSON.$K$1];[.$A124];[$JSON.$L$1];[.$B124];[$JSON.$M$1])" office:value-type="string" office:string-value="{&quot;id&quot;:&quot;Y-4&quot;,&quot;name&quot;:&quot;孫権&quot;,&quot;imageUrl&quot;:&quot;https://one-draw.jp/ijinden/cardlist/Y01/card/02_Y_004.png&quot;,&quot;expansion&quot;:20,&quot;type&quot;:1,&quot;level&quot;:5,&quot;color&quot;:8,&quot;term&quot;:0,&quot;trait&quot;:0,&quot;legacy&quot;:0,&quot;orderTable&quot;:123,&quot;orderDeck&quot;:171}," calcext:value-type="string">
            <text:p>{"id":"Y-4","name":"孫権","imageUrl":"https://one-draw.jp/ijinden/cardlist/Y01/card/02_Y_004.png","expansion":20,"type":1,"level":5,"color":8,"term":0,"trait":0,"legacy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JSON.$A$1];[.$C125];[$JSON.$B$1];[.$E125];[$JSON.$C$1];[.$T125];[$JSON.$D$1];[.$G125];[$JSON.$E$1];[.$I125];[$JSON.$F$1];[.$L125];[$JSON.$G$1];[.$K125];[$JSON.$H$1];[.$O125];[$JSON.$I$1];[.$Q125];[$JSON.$J$1];[.$S125];[$JSON.$K$1];[.$A125];[$JSON.$L$1];[.$B125];[$JSON.$M$1])" office:value-type="string" office:string-value="{&quot;id&quot;:&quot;Y-5&quot;,&quot;name&quot;:&quot;シャクシャイン&quot;,&quot;imageUrl&quot;:&quot;https://one-draw.jp/ijinden/cardlist/Y01/card/02_Y_005.png&quot;,&quot;expansion&quot;:20,&quot;type&quot;:1,&quot;level&quot;:7,&quot;color&quot;:8,&quot;term&quot;:4,&quot;trait&quot;:0,&quot;legacy&quot;:0,&quot;orderTable&quot;:124,&quot;orderDeck&quot;:213}," calcext:value-type="string">
            <text:p>{"id":"Y-5","name":"シャクシャイン","imageUrl":"https://one-draw.jp/ijinden/cardlist/Y01/card/02_Y_005.png","expansion":20,"type":1,"level":7,"color":8,"term":4,"trait":0,"legacy":0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JSON.$A$1];[.$C126];[$JSON.$B$1];[.$E126];[$JSON.$C$1];[.$T126];[$JSON.$D$1];[.$G126];[$JSON.$E$1];[.$I126];[$JSON.$F$1];[.$L126];[$JSON.$G$1];[.$K126];[$JSON.$H$1];[.$O126];[$JSON.$I$1];[.$Q126];[$JSON.$J$1];[.$S126];[$JSON.$K$1];[.$A126];[$JSON.$L$1];[.$B126];[$JSON.$M$1])" office:value-type="string" office:string-value="{&quot;id&quot;:&quot;Y-6&quot;,&quot;name&quot;:&quot;フビライ・ハン&quot;,&quot;imageUrl&quot;:&quot;https://one-draw.jp/ijinden/cardlist/Y01/card/02_Y_006.png&quot;,&quot;expansion&quot;:20,&quot;type&quot;:1,&quot;level&quot;:6,&quot;color&quot;:8,&quot;term&quot;:0,&quot;trait&quot;:0,&quot;legacy&quot;:0,&quot;orderTable&quot;:125,&quot;orderDeck&quot;:197}," calcext:value-type="string">
            <text:p>{"id":"Y-6","name":"フビライ・ハン","imageUrl":"https://one-draw.jp/ijinden/cardlist/Y01/card/02_Y_006.png","expansion":20,"type":1,"level":6,"color":8,"term":0,"trait":0,"legacy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2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JSON.$A$1];[.$C127];[$JSON.$B$1];[.$E127];[$JSON.$C$1];[.$T127];[$JSON.$D$1];[.$G127];[$JSON.$E$1];[.$I127];[$JSON.$F$1];[.$L127];[$JSON.$G$1];[.$K127];[$JSON.$H$1];[.$O127];[$JSON.$I$1];[.$Q127];[$JSON.$J$1];[.$S127];[$JSON.$K$1];[.$A127];[$JSON.$L$1];[.$B127];[$JSON.$M$1])" office:value-type="string" office:string-value="{&quot;id&quot;:&quot;Y-7&quot;,&quot;name&quot;:&quot;足利義教&quot;,&quot;imageUrl&quot;:&quot;https://one-draw.jp/ijinden/cardlist/Y01/card/02_Y_007.png&quot;,&quot;expansion&quot;:20,&quot;type&quot;:1,&quot;level&quot;:2,&quot;color&quot;:8,&quot;term&quot;:0,&quot;trait&quot;:0,&quot;legacy&quot;:0,&quot;orderTable&quot;:126,&quot;orderDeck&quot;:53}," calcext:value-type="string">
            <text:p>{"id":"Y-7","name":"足利義教","imageUrl":"https://one-draw.jp/ijinden/cardlist/Y01/card/02_Y_007.png","expansion":20,"type":1,"level":2,"color":8,"term":0,"trait":0,"legacy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28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JSON.$A$1];[.$C128];[$JSON.$B$1];[.$E128];[$JSON.$C$1];[.$T128];[$JSON.$D$1];[.$G128];[$JSON.$E$1];[.$I128];[$JSON.$F$1];[.$L128];[$JSON.$G$1];[.$K128];[$JSON.$H$1];[.$O128];[$JSON.$I$1];[.$Q128];[$JSON.$J$1];[.$S128];[$JSON.$K$1];[.$A128];[$JSON.$L$1];[.$B128];[$JSON.$M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level&quot;:1,&quot;color&quot;:8,&quot;term&quot;:0,&quot;trait&quot;:2,&quot;legacy&quot;:4,&quot;orderTable&quot;:127,&quot;orderDeck&quot;:15}," calcext:value-type="string">
            <text:p>{"id":"Y-8","name":"ヴィジェ＝ルブラン","imageUrl":"https://one-draw.jp/ijinden/cardlist/Y01/card/02_Y_008.png","expansion":20,"type":1,"level":1,"color":8,"term":0,"trait":2,"legacy":4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29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JSON.$A$1];[.$C129];[$JSON.$B$1];[.$E129];[$JSON.$C$1];[.$T129];[$JSON.$D$1];[.$G129];[$JSON.$E$1];[.$I129];[$JSON.$F$1];[.$L129];[$JSON.$G$1];[.$K129];[$JSON.$H$1];[.$O129];[$JSON.$I$1];[.$Q129];[$JSON.$J$1];[.$S129];[$JSON.$K$1];[.$A129];[$JSON.$L$1];[.$B129];[$JSON.$M$1])" office:value-type="string" office:string-value="{&quot;id&quot;:&quot;Y-9&quot;,&quot;name&quot;:&quot;英傑集う大河&quot;,&quot;imageUrl&quot;:&quot;https://one-draw.jp/ijinden/cardlist/Y01/card/02_Y_009.png&quot;,&quot;expansion&quot;:20,&quot;type&quot;:2,&quot;level&quot;:3,&quot;color&quot;:8,&quot;term&quot;:0,&quot;trait&quot;:0,&quot;legacy&quot;:7,&quot;orderTable&quot;:128,&quot;orderDeck&quot;:255}," calcext:value-type="string">
            <text:p>{"id":"Y-9","name":"英傑集う大河","imageUrl":"https://one-draw.jp/ijinden/cardlist/Y01/card/02_Y_009.png","expansion":20,"type":2,"level":3,"color":8,"term":0,"trait":0,"legacy":7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3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JSON.$A$1];[.$C130];[$JSON.$B$1];[.$E130];[$JSON.$C$1];[.$T130];[$JSON.$D$1];[.$G130];[$JSON.$E$1];[.$I130];[$JSON.$F$1];[.$L130];[$JSON.$G$1];[.$K130];[$JSON.$H$1];[.$O130];[$JSON.$I$1];[.$Q130];[$JSON.$J$1];[.$S130];[$JSON.$K$1];[.$A130];[$JSON.$L$1];[.$B130];[$JSON.$M$1])" office:value-type="string" office:string-value="{&quot;id&quot;:&quot;Y-10&quot;,&quot;name&quot;:&quot;地上の紫微垣&quot;,&quot;imageUrl&quot;:&quot;https://one-draw.jp/ijinden/cardlist/Y01/card/02_Y_010.png&quot;,&quot;expansion&quot;:20,&quot;type&quot;:2,&quot;level&quot;:2,&quot;color&quot;:8,&quot;term&quot;:0,&quot;trait&quot;:0,&quot;legacy&quot;:7,&quot;orderTable&quot;:129,&quot;orderDeck&quot;:245}," calcext:value-type="string">
            <text:p>{"id":"Y-10","name":"地上の紫微垣","imageUrl":"https://one-draw.jp/ijinden/cardlist/Y01/card/02_Y_010.png","expansion":20,"type":2,"level":2,"color":8,"term":0,"trait":0,"legacy":7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3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JSON.$A$1];[.$C131];[$JSON.$B$1];[.$E131];[$JSON.$C$1];[.$T131];[$JSON.$D$1];[.$G131];[$JSON.$E$1];[.$I131];[$JSON.$F$1];[.$L131];[$JSON.$G$1];[.$K131];[$JSON.$H$1];[.$O131];[$JSON.$I$1];[.$Q131];[$JSON.$J$1];[.$S131];[$JSON.$K$1];[.$A131];[$JSON.$L$1];[.$B131];[$JSON.$M$1])" office:value-type="string" office:string-value="{&quot;id&quot;:&quot;Y-11&quot;,&quot;name&quot;:&quot;ネハン&quot;,&quot;imageUrl&quot;:&quot;https://one-draw.jp/ijinden/cardlist/Y01/card/02_Y_011.png&quot;,&quot;expansion&quot;:20,&quot;type&quot;:3,&quot;level&quot;:2,&quot;color&quot;:8,&quot;term&quot;:0,&quot;trait&quot;:0,&quot;legacy&quot;:2,&quot;orderTable&quot;:130,&quot;orderDeck&quot;:300}," calcext:value-type="string">
            <text:p>{"id":"Y-11","name":"ネハン","imageUrl":"https://one-draw.jp/ijinden/cardlist/Y01/card/02_Y_011.png","expansion":20,"type":3,"level":2,"color":8,"term":0,"trait":0,"legacy":2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3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JSON.$A$1];[.$C132];[$JSON.$B$1];[.$E132];[$JSON.$C$1];[.$T132];[$JSON.$D$1];[.$G132];[$JSON.$E$1];[.$I132];[$JSON.$F$1];[.$L132];[$JSON.$G$1];[.$K132];[$JSON.$H$1];[.$O132];[$JSON.$I$1];[.$Q132];[$JSON.$J$1];[.$S132];[$JSON.$K$1];[.$A132];[$JSON.$L$1];[.$B132];[$JSON.$M$1])" office:value-type="string" office:string-value="{&quot;id&quot;:&quot;Y-12&quot;,&quot;name&quot;:&quot;レクイエム&quot;,&quot;imageUrl&quot;:&quot;https://one-draw.jp/ijinden/cardlist/Y01/card/02_Y_012.png&quot;,&quot;expansion&quot;:20,&quot;type&quot;:3,&quot;level&quot;:1,&quot;color&quot;:8,&quot;term&quot;:0,&quot;trait&quot;:0,&quot;legacy&quot;:5,&quot;orderTable&quot;:131,&quot;orderDeck&quot;:285}," calcext:value-type="string">
            <text:p>{"id":"Y-12","name":"レクイエム","imageUrl":"https://one-draw.jp/ijinden/cardlist/Y01/card/02_Y_012.png","expansion":20,"type":3,"level":1,"color":8,"term":0,"trait":0,"legacy":5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13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JSON.$A$1];[.$C133];[$JSON.$B$1];[.$E133];[$JSON.$C$1];[.$T133];[$JSON.$D$1];[.$G133];[$JSON.$E$1];[.$I133];[$JSON.$F$1];[.$L133];[$JSON.$G$1];[.$K133];[$JSON.$H$1];[.$O133];[$JSON.$I$1];[.$Q133];[$JSON.$J$1];[.$S133];[$JSON.$K$1];[.$A133];[$JSON.$L$1];[.$B133];[$JSON.$M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level&quot;:1,&quot;color&quot;:8,&quot;term&quot;:0,&quot;trait&quot;:0,&quot;legacy&quot;:3,&quot;orderTable&quot;:132,&quot;orderDeck&quot;:361}," calcext:value-type="string">
            <text:p>{"id":"Y-13","name":"イエローストーン","imageUrl":"https://one-draw.jp/ijinden/cardlist/Y01/card/02_Y_013.png","expansion":20,"type":4,"level":1,"color":8,"term":0,"trait":0,"legacy":3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剣術</text:p>
          </table:table-cell>
          <table:table-cell table:formula="of:=IFERROR(VLOOKUP([.$P134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3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JSON.$A$1];[.$C134];[$JSON.$B$1];[.$E134];[$JSON.$C$1];[.$T134];[$JSON.$D$1];[.$G134];[$JSON.$E$1];[.$I134];[$JSON.$F$1];[.$L134];[$JSON.$G$1];[.$K134];[$JSON.$H$1];[.$O134];[$JSON.$I$1];[.$Q134];[$JSON.$J$1];[.$S134];[$JSON.$K$1];[.$A134];[$JSON.$L$1];[.$B134];[$JSON.$M$1])" office:value-type="string" office:string-value="{&quot;id&quot;:&quot;2-1&quot;,&quot;name&quot;:&quot;天草四郎&quot;,&quot;imageUrl&quot;:&quot;https://one-draw.jp/ijinden/cardlist/002/card/02_001.png&quot;,&quot;expansion&quot;:25,&quot;type&quot;:1,&quot;level&quot;:3,&quot;color&quot;:1,&quot;term&quot;:4,&quot;trait&quot;:1,&quot;legacy&quot;:6,&quot;orderTable&quot;:133,&quot;orderDeck&quot;:69}," calcext:value-type="string">
            <text:p>{"id":"2-1","name":"天草四郎","imageUrl":"https://one-draw.jp/ijinden/cardlist/002/card/02_001.png","expansion":25,"type":1,"level":3,"color":1,"term":4,"trait":1,"legacy":6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3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JSON.$A$1];[.$C135];[$JSON.$B$1];[.$E135];[$JSON.$C$1];[.$T135];[$JSON.$D$1];[.$G135];[$JSON.$E$1];[.$I135];[$JSON.$F$1];[.$L135];[$JSON.$G$1];[.$K135];[$JSON.$H$1];[.$O135];[$JSON.$I$1];[.$Q135];[$JSON.$J$1];[.$S135];[$JSON.$K$1];[.$A135];[$JSON.$L$1];[.$B135];[$JSON.$M$1])" office:value-type="string" office:string-value="{&quot;id&quot;:&quot;2-2&quot;,&quot;name&quot;:&quot;ピョートル大帝&quot;,&quot;imageUrl&quot;:&quot;https://one-draw.jp/ijinden/cardlist/002/card/02_002.png&quot;,&quot;expansion&quot;:25,&quot;type&quot;:1,&quot;level&quot;:5,&quot;color&quot;:2,&quot;term&quot;:8,&quot;trait&quot;:0,&quot;legacy&quot;:0,&quot;orderTable&quot;:134,&quot;orderDeck&quot;:158}," calcext:value-type="string">
            <text:p>{"id":"2-2","name":"ピョートル大帝","imageUrl":"https://one-draw.jp/ijinden/cardlist/002/card/02_002.png","expansion":25,"type":1,"level":5,"color":2,"term":8,"trait":0,"legacy":0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3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JSON.$A$1];[.$C136];[$JSON.$B$1];[.$E136];[$JSON.$C$1];[.$T136];[$JSON.$D$1];[.$G136];[$JSON.$E$1];[.$I136];[$JSON.$F$1];[.$L136];[$JSON.$G$1];[.$K136];[$JSON.$H$1];[.$O136];[$JSON.$I$1];[.$Q136];[$JSON.$J$1];[.$S136];[$JSON.$K$1];[.$A136];[$JSON.$L$1];[.$B136];[$JSON.$M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level&quot;:9,&quot;color&quot;:4,&quot;term&quot;:0,&quot;trait&quot;:0,&quot;legacy&quot;:1,&quot;orderTable&quot;:135,&quot;orderDeck&quot;:230}," calcext:value-type="string">
            <text:p>{"id":"2-3","name":"エイブラハム・リンカン","imageUrl":"https://one-draw.jp/ijinden/cardlist/002/card/02_003.png","expansion":25,"type":1,"level":9,"color":4,"term":0,"trait":0,"legacy":1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JSON.$A$1];[.$C137];[$JSON.$B$1];[.$E137];[$JSON.$C$1];[.$T137];[$JSON.$D$1];[.$G137];[$JSON.$E$1];[.$I137];[$JSON.$F$1];[.$L137];[$JSON.$G$1];[.$K137];[$JSON.$H$1];[.$O137];[$JSON.$I$1];[.$Q137];[$JSON.$J$1];[.$S137];[$JSON.$K$1];[.$A137];[$JSON.$L$1];[.$B137];[$JSON.$M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level&quot;:8,&quot;color&quot;:8,&quot;term&quot;:0,&quot;trait&quot;:0,&quot;legacy&quot;:1,&quot;orderTable&quot;:136,&quot;orderDeck&quot;:224}," calcext:value-type="string">
            <text:p>{"id":"2-4","name":"アイザック・ニュートン","imageUrl":"https://one-draw.jp/ijinden/cardlist/002/card/02_004.png","expansion":25,"type":1,"level":8,"color":8,"term":0,"trait":0,"legacy":1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3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JSON.$A$1];[.$C138];[$JSON.$B$1];[.$E138];[$JSON.$C$1];[.$T138];[$JSON.$D$1];[.$G138];[$JSON.$E$1];[.$I138];[$JSON.$F$1];[.$L138];[$JSON.$G$1];[.$K138];[$JSON.$H$1];[.$O138];[$JSON.$I$1];[.$Q138];[$JSON.$J$1];[.$S138];[$JSON.$K$1];[.$A138];[$JSON.$L$1];[.$B138];[$JSON.$M$1])" office:value-type="string" office:string-value="{&quot;id&quot;:&quot;2-5&quot;,&quot;name&quot;:&quot;親鸞&quot;,&quot;imageUrl&quot;:&quot;https://one-draw.jp/ijinden/cardlist/002/card/02_005.png&quot;,&quot;expansion&quot;:25,&quot;type&quot;:1,&quot;level&quot;:4,&quot;color&quot;:8,&quot;term&quot;:0,&quot;trait&quot;:0,&quot;legacy&quot;:7,&quot;orderTable&quot;:137,&quot;orderDeck&quot;:133}," calcext:value-type="string">
            <text:p>{"id":"2-5","name":"親鸞","imageUrl":"https://one-draw.jp/ijinden/cardlist/002/card/02_005.png","expansion":25,"type":1,"level":4,"color":8,"term":0,"trait":0,"legacy":7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3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JSON.$A$1];[.$C139];[$JSON.$B$1];[.$E139];[$JSON.$C$1];[.$T139];[$JSON.$D$1];[.$G139];[$JSON.$E$1];[.$I139];[$JSON.$F$1];[.$L139];[$JSON.$G$1];[.$K139];[$JSON.$H$1];[.$O139];[$JSON.$I$1];[.$Q139];[$JSON.$J$1];[.$S139];[$JSON.$K$1];[.$A139];[$JSON.$L$1];[.$B139];[$JSON.$M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level&quot;:7,&quot;color&quot;:8,&quot;term&quot;:8,&quot;trait&quot;:0,&quot;legacy&quot;:0,&quot;orderTable&quot;:138,&quot;orderDeck&quot;:214}," calcext:value-type="string">
            <text:p>{"id":"2-6","name":"ナポレオン・ボナパルト","imageUrl":"https://one-draw.jp/ijinden/cardlist/002/card/02_006.png","expansion":25,"type":1,"level":7,"color":8,"term":8,"trait":0,"legacy":0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40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JSON.$A$1];[.$C140];[$JSON.$B$1];[.$E140];[$JSON.$C$1];[.$T140];[$JSON.$D$1];[.$G140];[$JSON.$E$1];[.$I140];[$JSON.$F$1];[.$L140];[$JSON.$G$1];[.$K140];[$JSON.$H$1];[.$O140];[$JSON.$I$1];[.$Q140];[$JSON.$J$1];[.$S140];[$JSON.$K$1];[.$A140];[$JSON.$L$1];[.$B140];[$JSON.$M$1])" office:value-type="string" office:string-value="{&quot;id&quot;:&quot;2-7&quot;,&quot;name&quot;:&quot;日野富子&quot;,&quot;imageUrl&quot;:&quot;https://one-draw.jp/ijinden/cardlist/002/card/02_007.png&quot;,&quot;expansion&quot;:25,&quot;type&quot;:1,&quot;level&quot;:2,&quot;color&quot;:1,&quot;term&quot;:0,&quot;trait&quot;:0,&quot;legacy&quot;:6,&quot;orderTable&quot;:139,&quot;orderDeck&quot;:28}," calcext:value-type="string">
            <text:p>{"id":"2-7","name":"日野富子","imageUrl":"https://one-draw.jp/ijinden/cardlist/002/card/02_007.png","expansion":25,"type":1,"level":2,"color":1,"term":0,"trait":0,"legacy":6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JSON.$A$1];[.$C141];[$JSON.$B$1];[.$E141];[$JSON.$C$1];[.$T141];[$JSON.$D$1];[.$G141];[$JSON.$E$1];[.$I141];[$JSON.$F$1];[.$L141];[$JSON.$G$1];[.$K141];[$JSON.$H$1];[.$O141];[$JSON.$I$1];[.$Q141];[$JSON.$J$1];[.$S141];[$JSON.$K$1];[.$A141];[$JSON.$L$1];[.$B141];[$JSON.$M$1])" office:value-type="string" office:string-value="{&quot;id&quot;:&quot;2-8&quot;,&quot;name&quot;:&quot;豊臣秀吉&quot;,&quot;imageUrl&quot;:&quot;https://one-draw.jp/ijinden/cardlist/002/card/02_008.png&quot;,&quot;expansion&quot;:25,&quot;type&quot;:1,&quot;level&quot;:10,&quot;color&quot;:1,&quot;term&quot;:0,&quot;trait&quot;:0,&quot;legacy&quot;:0,&quot;orderTable&quot;:140,&quot;orderDeck&quot;:234}," calcext:value-type="string">
            <text:p>{"id":"2-8","name":"豊臣秀吉","imageUrl":"https://one-draw.jp/ijinden/cardlist/002/card/02_008.png","expansion":25,"type":1,"level":10,"color":1,"term":0,"trait":0,"legacy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4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JSON.$A$1];[.$C142];[$JSON.$B$1];[.$E142];[$JSON.$C$1];[.$T142];[$JSON.$D$1];[.$G142];[$JSON.$E$1];[.$I142];[$JSON.$F$1];[.$L142];[$JSON.$G$1];[.$K142];[$JSON.$H$1];[.$O142];[$JSON.$I$1];[.$Q142];[$JSON.$J$1];[.$S142];[$JSON.$K$1];[.$A142];[$JSON.$L$1];[.$B142];[$JSON.$M$1])" office:value-type="string" office:string-value="{&quot;id&quot;:&quot;2-9&quot;,&quot;name&quot;:&quot;石田三成&quot;,&quot;imageUrl&quot;:&quot;https://one-draw.jp/ijinden/cardlist/002/card/02_009.png&quot;,&quot;expansion&quot;:25,&quot;type&quot;:1,&quot;level&quot;:5,&quot;color&quot;:1,&quot;term&quot;:4,&quot;trait&quot;:0,&quot;legacy&quot;:1,&quot;orderTable&quot;:141,&quot;orderDeck&quot;:148}," calcext:value-type="string">
            <text:p>{"id":"2-9","name":"石田三成","imageUrl":"https://one-draw.jp/ijinden/cardlist/002/card/02_009.png","expansion":25,"type":1,"level":5,"color":1,"term":4,"trait":0,"legacy":1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JSON.$A$1];[.$C143];[$JSON.$B$1];[.$E143];[$JSON.$C$1];[.$T143];[$JSON.$D$1];[.$G143];[$JSON.$E$1];[.$I143];[$JSON.$F$1];[.$L143];[$JSON.$G$1];[.$K143];[$JSON.$H$1];[.$O143];[$JSON.$I$1];[.$Q143];[$JSON.$J$1];[.$S143];[$JSON.$K$1];[.$A143];[$JSON.$L$1];[.$B143];[$JSON.$M$1])" office:value-type="string" office:string-value="{&quot;id&quot;:&quot;2-10&quot;,&quot;name&quot;:&quot;栄西&quot;,&quot;imageUrl&quot;:&quot;https://one-draw.jp/ijinden/cardlist/002/card/02_010.png&quot;,&quot;expansion&quot;:25,&quot;type&quot;:1,&quot;level&quot;:1,&quot;color&quot;:1,&quot;term&quot;:0,&quot;trait&quot;:0,&quot;legacy&quot;:4,&quot;orderTable&quot;:142,&quot;orderDeck&quot;:4}," calcext:value-type="string">
            <text:p>{"id":"2-10","name":"栄西","imageUrl":"https://one-draw.jp/ijinden/cardlist/002/card/02_010.png","expansion":25,"type":1,"level":1,"color":1,"term":0,"trait":0,"legacy":4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JSON.$A$1];[.$C144];[$JSON.$B$1];[.$E144];[$JSON.$C$1];[.$T144];[$JSON.$D$1];[.$G144];[$JSON.$E$1];[.$I144];[$JSON.$F$1];[.$L144];[$JSON.$G$1];[.$K144];[$JSON.$H$1];[.$O144];[$JSON.$I$1];[.$Q144];[$JSON.$J$1];[.$S144];[$JSON.$K$1];[.$A144];[$JSON.$L$1];[.$B144];[$JSON.$M$1])" office:value-type="string" office:string-value="{&quot;id&quot;:&quot;2-11&quot;,&quot;name&quot;:&quot;道元&quot;,&quot;imageUrl&quot;:&quot;https://one-draw.jp/ijinden/cardlist/002/card/02_011.png&quot;,&quot;expansion&quot;:25,&quot;type&quot;:1,&quot;level&quot;:3,&quot;color&quot;:1,&quot;term&quot;:0,&quot;trait&quot;:0,&quot;legacy&quot;:4,&quot;orderTable&quot;:143,&quot;orderDeck&quot;:70}," calcext:value-type="string">
            <text:p>{"id":"2-11","name":"道元","imageUrl":"https://one-draw.jp/ijinden/cardlist/002/card/02_011.png","expansion":25,"type":1,"level":3,"color":1,"term":0,"trait":0,"legacy":4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4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JSON.$A$1];[.$C145];[$JSON.$B$1];[.$E145];[$JSON.$C$1];[.$T145];[$JSON.$D$1];[.$G145];[$JSON.$E$1];[.$I145];[$JSON.$F$1];[.$L145];[$JSON.$G$1];[.$K145];[$JSON.$H$1];[.$O145];[$JSON.$I$1];[.$Q145];[$JSON.$J$1];[.$S145];[$JSON.$K$1];[.$A145];[$JSON.$L$1];[.$B145];[$JSON.$M$1])" office:value-type="string" office:string-value="{&quot;id&quot;:&quot;2-12&quot;,&quot;name&quot;:&quot;足利義昭&quot;,&quot;imageUrl&quot;:&quot;https://one-draw.jp/ijinden/cardlist/002/card/02_012.png&quot;,&quot;expansion&quot;:25,&quot;type&quot;:1,&quot;level&quot;:9,&quot;color&quot;:1,&quot;term&quot;:0,&quot;trait&quot;:0,&quot;legacy&quot;:1,&quot;orderTable&quot;:144,&quot;orderDeck&quot;:229}," calcext:value-type="string">
            <text:p>{"id":"2-12","name":"足利義昭","imageUrl":"https://one-draw.jp/ijinden/cardlist/002/card/02_012.png","expansion":25,"type":1,"level":9,"color":1,"term":0,"trait":0,"legacy":1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JSON.$A$1];[.$C146];[$JSON.$B$1];[.$E146];[$JSON.$C$1];[.$T146];[$JSON.$D$1];[.$G146];[$JSON.$E$1];[.$I146];[$JSON.$F$1];[.$L146];[$JSON.$G$1];[.$K146];[$JSON.$H$1];[.$O146];[$JSON.$I$1];[.$Q146];[$JSON.$J$1];[.$S146];[$JSON.$K$1];[.$A146];[$JSON.$L$1];[.$B146];[$JSON.$M$1])" office:value-type="string" office:string-value="{&quot;id&quot;:&quot;2-13&quot;,&quot;name&quot;:&quot;毛利輝元&quot;,&quot;imageUrl&quot;:&quot;https://one-draw.jp/ijinden/cardlist/002/card/02_013.png&quot;,&quot;expansion&quot;:25,&quot;type&quot;:1,&quot;level&quot;:6,&quot;color&quot;:1,&quot;term&quot;:0,&quot;trait&quot;:0,&quot;legacy&quot;:0,&quot;orderTable&quot;:145,&quot;orderDeck&quot;:182}," calcext:value-type="string">
            <text:p>{"id":"2-13","name":"毛利輝元","imageUrl":"https://one-draw.jp/ijinden/cardlist/002/card/02_013.png","expansion":25,"type":1,"level":6,"color":1,"term":0,"trait":0,"legacy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47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JSON.$A$1];[.$C147];[$JSON.$B$1];[.$E147];[$JSON.$C$1];[.$T147];[$JSON.$D$1];[.$G147];[$JSON.$E$1];[.$I147];[$JSON.$F$1];[.$L147];[$JSON.$G$1];[.$K147];[$JSON.$H$1];[.$O147];[$JSON.$I$1];[.$Q147];[$JSON.$J$1];[.$S147];[$JSON.$K$1];[.$A147];[$JSON.$L$1];[.$B147];[$JSON.$M$1])" office:value-type="string" office:string-value="{&quot;id&quot;:&quot;2-14&quot;,&quot;name&quot;:&quot;北条時政&quot;,&quot;imageUrl&quot;:&quot;https://one-draw.jp/ijinden/cardlist/002/card/02_014.png&quot;,&quot;expansion&quot;:25,&quot;type&quot;:1,&quot;level&quot;:5,&quot;color&quot;:1,&quot;term&quot;:0,&quot;trait&quot;:1,&quot;legacy&quot;:4,&quot;orderTable&quot;:146,&quot;orderDeck&quot;:149}," calcext:value-type="string">
            <text:p>{"id":"2-14","name":"北条時政","imageUrl":"https://one-draw.jp/ijinden/cardlist/002/card/02_014.png","expansion":25,"type":1,"level":5,"color":1,"term":0,"trait":1,"legacy":4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JSON.$A$1];[.$C148];[$JSON.$B$1];[.$E148];[$JSON.$C$1];[.$T148];[$JSON.$D$1];[.$G148];[$JSON.$E$1];[.$I148];[$JSON.$F$1];[.$L148];[$JSON.$G$1];[.$K148];[$JSON.$H$1];[.$O148];[$JSON.$I$1];[.$Q148];[$JSON.$J$1];[.$S148];[$JSON.$K$1];[.$A148];[$JSON.$L$1];[.$B148];[$JSON.$M$1])" office:value-type="string" office:string-value="{&quot;id&quot;:&quot;2-15&quot;,&quot;name&quot;:&quot;北条時宗&quot;,&quot;imageUrl&quot;:&quot;https://one-draw.jp/ijinden/cardlist/002/card/02_015.png&quot;,&quot;expansion&quot;:25,&quot;type&quot;:1,&quot;level&quot;:7,&quot;color&quot;:1,&quot;term&quot;:0,&quot;trait&quot;:0,&quot;legacy&quot;:0,&quot;orderTable&quot;:147,&quot;orderDeck&quot;:204}," calcext:value-type="string">
            <text:p>{"id":"2-15","name":"北条時宗","imageUrl":"https://one-draw.jp/ijinden/cardlist/002/card/02_015.png","expansion":25,"type":1,"level":7,"color":1,"term":0,"trait":0,"legacy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49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4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JSON.$A$1];[.$C149];[$JSON.$B$1];[.$E149];[$JSON.$C$1];[.$T149];[$JSON.$D$1];[.$G149];[$JSON.$E$1];[.$I149];[$JSON.$F$1];[.$L149];[$JSON.$G$1];[.$K149];[$JSON.$H$1];[.$O149];[$JSON.$I$1];[.$Q149];[$JSON.$J$1];[.$S149];[$JSON.$K$1];[.$A149];[$JSON.$L$1];[.$B149];[$JSON.$M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level&quot;:2,&quot;color&quot;:2,&quot;term&quot;:0,&quot;trait&quot;:8,&quot;legacy&quot;:4,&quot;orderTable&quot;:148,&quot;orderDeck&quot;:37}," calcext:value-type="string">
            <text:p>{"id":"2-16","name":"シャルル・ド・モンテスキュー","imageUrl":"https://one-draw.jp/ijinden/cardlist/002/card/02_016.png","expansion":25,"type":1,"level":2,"color":2,"term":0,"trait":8,"legacy":4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0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JSON.$A$1];[.$C150];[$JSON.$B$1];[.$E150];[$JSON.$C$1];[.$T150];[$JSON.$D$1];[.$G150];[$JSON.$E$1];[.$I150];[$JSON.$F$1];[.$L150];[$JSON.$G$1];[.$K150];[$JSON.$H$1];[.$O150];[$JSON.$I$1];[.$Q150];[$JSON.$J$1];[.$S150];[$JSON.$K$1];[.$A150];[$JSON.$L$1];[.$B150];[$JSON.$M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level&quot;:3,&quot;color&quot;:2,&quot;term&quot;:0,&quot;trait&quot;:8,&quot;legacy&quot;:4,&quot;orderTable&quot;:149,&quot;orderDeck&quot;:80}," calcext:value-type="string">
            <text:p>{"id":"2-17","name":"ジャン＝ジャック・ルソー","imageUrl":"https://one-draw.jp/ijinden/cardlist/002/card/02_017.png","expansion":25,"type":1,"level":3,"color":2,"term":0,"trait":8,"legacy":4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JSON.$A$1];[.$C151];[$JSON.$B$1];[.$E151];[$JSON.$C$1];[.$T151];[$JSON.$D$1];[.$G151];[$JSON.$E$1];[.$I151];[$JSON.$F$1];[.$L151];[$JSON.$G$1];[.$K151];[$JSON.$H$1];[.$O151];[$JSON.$I$1];[.$Q151];[$JSON.$J$1];[.$S151];[$JSON.$K$1];[.$A151];[$JSON.$L$1];[.$B151];[$JSON.$M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level&quot;:2,&quot;color&quot;:2,&quot;term&quot;:0,&quot;trait&quot;:0,&quot;legacy&quot;:4,&quot;orderTable&quot;:150,&quot;orderDeck&quot;:38}," calcext:value-type="string">
            <text:p>{"id":"2-18","name":"エカチェリーナ2世","imageUrl":"https://one-draw.jp/ijinden/cardlist/002/card/02_018.png","expansion":25,"type":1,"level":2,"color":2,"term":0,"trait":0,"legacy":4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2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JSON.$A$1];[.$C152];[$JSON.$B$1];[.$E152];[$JSON.$C$1];[.$T152];[$JSON.$D$1];[.$G152];[$JSON.$E$1];[.$I152];[$JSON.$F$1];[.$L152];[$JSON.$G$1];[.$K152];[$JSON.$H$1];[.$O152];[$JSON.$I$1];[.$Q152];[$JSON.$J$1];[.$S152];[$JSON.$K$1];[.$A152];[$JSON.$L$1];[.$B152];[$JSON.$M$1])" office:value-type="string" office:string-value="{&quot;id&quot;:&quot;2-19&quot;,&quot;name&quot;:&quot;ジョン・ロック&quot;,&quot;imageUrl&quot;:&quot;https://one-draw.jp/ijinden/cardlist/002/card/02_019.png&quot;,&quot;expansion&quot;:25,&quot;type&quot;:1,&quot;level&quot;:1,&quot;color&quot;:2,&quot;term&quot;:0,&quot;trait&quot;:8,&quot;legacy&quot;:4,&quot;orderTable&quot;:151,&quot;orderDeck&quot;:8}," calcext:value-type="string">
            <text:p>{"id":"2-19","name":"ジョン・ロック","imageUrl":"https://one-draw.jp/ijinden/cardlist/002/card/02_019.png","expansion":25,"type":1,"level":1,"color":2,"term":0,"trait":8,"legacy":4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JSON.$A$1];[.$C153];[$JSON.$B$1];[.$E153];[$JSON.$C$1];[.$T153];[$JSON.$D$1];[.$G153];[$JSON.$E$1];[.$I153];[$JSON.$F$1];[.$L153];[$JSON.$G$1];[.$K153];[$JSON.$H$1];[.$O153];[$JSON.$I$1];[.$Q153];[$JSON.$J$1];[.$S153];[$JSON.$K$1];[.$A153];[$JSON.$L$1];[.$B153];[$JSON.$M$1])" office:value-type="string" office:string-value="{&quot;id&quot;:&quot;2-20&quot;,&quot;name&quot;:&quot;洪秀全&quot;,&quot;imageUrl&quot;:&quot;https://one-draw.jp/ijinden/cardlist/002/card/02_020.png&quot;,&quot;expansion&quot;:25,&quot;type&quot;:1,&quot;level&quot;:2,&quot;color&quot;:2,&quot;term&quot;:8,&quot;trait&quot;:0,&quot;legacy&quot;:4,&quot;orderTable&quot;:152,&quot;orderDeck&quot;:39}," calcext:value-type="string">
            <text:p>{"id":"2-20","name":"洪秀全","imageUrl":"https://one-draw.jp/ijinden/cardlist/002/card/02_020.png","expansion":25,"type":1,"level":2,"color":2,"term":8,"trait":0,"legacy":4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5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JSON.$A$1];[.$C154];[$JSON.$B$1];[.$E154];[$JSON.$C$1];[.$T154];[$JSON.$D$1];[.$G154];[$JSON.$E$1];[.$I154];[$JSON.$F$1];[.$L154];[$JSON.$G$1];[.$K154];[$JSON.$H$1];[.$O154];[$JSON.$I$1];[.$Q154];[$JSON.$J$1];[.$S154];[$JSON.$K$1];[.$A154];[$JSON.$L$1];[.$B154];[$JSON.$M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level&quot;:3,&quot;color&quot;:2,&quot;term&quot;:0,&quot;trait&quot;:0,&quot;legacy&quot;:6,&quot;orderTable&quot;:153,&quot;orderDeck&quot;:81}," calcext:value-type="string">
            <text:p>{"id":"2-21","name":"ジェームズ＝ワット","imageUrl":"https://one-draw.jp/ijinden/cardlist/002/card/02_021.png","expansion":25,"type":1,"level":3,"color":2,"term":0,"trait":0,"legacy":6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JSON.$A$1];[.$C155];[$JSON.$B$1];[.$E155];[$JSON.$C$1];[.$T155];[$JSON.$D$1];[.$G155];[$JSON.$E$1];[.$I155];[$JSON.$F$1];[.$L155];[$JSON.$G$1];[.$K155];[$JSON.$H$1];[.$O155];[$JSON.$I$1];[.$Q155];[$JSON.$J$1];[.$S155];[$JSON.$K$1];[.$A155];[$JSON.$L$1];[.$B155];[$JSON.$M$1])" office:value-type="string" office:string-value="{&quot;id&quot;:&quot;2-22&quot;,&quot;name&quot;:&quot;日蓮&quot;,&quot;imageUrl&quot;:&quot;https://one-draw.jp/ijinden/cardlist/002/card/02_022.png&quot;,&quot;expansion&quot;:25,&quot;type&quot;:1,&quot;level&quot;:4,&quot;color&quot;:2,&quot;term&quot;:1,&quot;trait&quot;:0,&quot;legacy&quot;:0,&quot;orderTable&quot;:154,&quot;orderDeck&quot;:120}," calcext:value-type="string">
            <text:p>{"id":"2-22","name":"日蓮","imageUrl":"https://one-draw.jp/ijinden/cardlist/002/card/02_022.png","expansion":25,"type":1,"level":4,"color":2,"term":1,"trait":0,"legacy":0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JSON.$A$1];[.$C156];[$JSON.$B$1];[.$E156];[$JSON.$C$1];[.$T156];[$JSON.$D$1];[.$G156];[$JSON.$E$1];[.$I156];[$JSON.$F$1];[.$L156];[$JSON.$G$1];[.$K156];[$JSON.$H$1];[.$O156];[$JSON.$I$1];[.$Q156];[$JSON.$J$1];[.$S156];[$JSON.$K$1];[.$A156];[$JSON.$L$1];[.$B156];[$JSON.$M$1])" office:value-type="string" office:string-value="{&quot;id&quot;:&quot;2-23&quot;,&quot;name&quot;:&quot;李舜臣&quot;,&quot;imageUrl&quot;:&quot;https://one-draw.jp/ijinden/cardlist/002/card/02_023.png&quot;,&quot;expansion&quot;:25,&quot;type&quot;:1,&quot;level&quot;:7,&quot;color&quot;:2,&quot;term&quot;:0,&quot;trait&quot;:0,&quot;legacy&quot;:0,&quot;orderTable&quot;:155,&quot;orderDeck&quot;:205}," calcext:value-type="string">
            <text:p>{"id":"2-23","name":"李舜臣","imageUrl":"https://one-draw.jp/ijinden/cardlist/002/card/02_023.png","expansion":25,"type":1,"level":7,"color":2,"term":0,"trait":0,"legacy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JSON.$A$1];[.$C157];[$JSON.$B$1];[.$E157];[$JSON.$C$1];[.$T157];[$JSON.$D$1];[.$G157];[$JSON.$E$1];[.$I157];[$JSON.$F$1];[.$L157];[$JSON.$G$1];[.$K157];[$JSON.$H$1];[.$O157];[$JSON.$I$1];[.$Q157];[$JSON.$J$1];[.$S157];[$JSON.$K$1];[.$A157];[$JSON.$L$1];[.$B157];[$JSON.$M$1])" office:value-type="string" office:string-value="{&quot;id&quot;:&quot;2-24&quot;,&quot;name&quot;:&quot;山田長政&quot;,&quot;imageUrl&quot;:&quot;https://one-draw.jp/ijinden/cardlist/002/card/02_024.png&quot;,&quot;expansion&quot;:25,&quot;type&quot;:1,&quot;level&quot;:5,&quot;color&quot;:2,&quot;term&quot;:1,&quot;trait&quot;:0,&quot;legacy&quot;:4,&quot;orderTable&quot;:156,&quot;orderDeck&quot;:159}," calcext:value-type="string">
            <text:p>{"id":"2-24","name":"山田長政","imageUrl":"https://one-draw.jp/ijinden/cardlist/002/card/02_024.png","expansion":25,"type":1,"level":5,"color":2,"term":1,"trait":0,"legacy":4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JSON.$A$1];[.$C158];[$JSON.$B$1];[.$E158];[$JSON.$C$1];[.$T158];[$JSON.$D$1];[.$G158];[$JSON.$E$1];[.$I158];[$JSON.$F$1];[.$L158];[$JSON.$G$1];[.$K158];[$JSON.$H$1];[.$O158];[$JSON.$I$1];[.$Q158];[$JSON.$J$1];[.$S158];[$JSON.$K$1];[.$A158];[$JSON.$L$1];[.$B158];[$JSON.$M$1])" office:value-type="string" office:string-value="{&quot;id&quot;:&quot;2-25&quot;,&quot;name&quot;:&quot;運慶&quot;,&quot;imageUrl&quot;:&quot;https://one-draw.jp/ijinden/cardlist/002/card/02_025.png&quot;,&quot;expansion&quot;:25,&quot;type&quot;:1,&quot;level&quot;:6,&quot;color&quot;:4,&quot;term&quot;:0,&quot;trait&quot;:0,&quot;legacy&quot;:0,&quot;orderTable&quot;:157,&quot;orderDeck&quot;:194}," calcext:value-type="string">
            <text:p>{"id":"2-25","name":"運慶","imageUrl":"https://one-draw.jp/ijinden/cardlist/002/card/02_025.png","expansion":25,"type":1,"level":6,"color":4,"term":0,"trait":0,"legacy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5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JSON.$A$1];[.$C159];[$JSON.$B$1];[.$E159];[$JSON.$C$1];[.$T159];[$JSON.$D$1];[.$G159];[$JSON.$E$1];[.$I159];[$JSON.$F$1];[.$L159];[$JSON.$G$1];[.$K159];[$JSON.$H$1];[.$O159];[$JSON.$I$1];[.$Q159];[$JSON.$J$1];[.$S159];[$JSON.$K$1];[.$A159];[$JSON.$L$1];[.$B159];[$JSON.$M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level&quot;:2,&quot;color&quot;:4,&quot;term&quot;:2,&quot;trait&quot;:0,&quot;legacy&quot;:4,&quot;orderTable&quot;:158,&quot;orderDeck&quot;:47}," calcext:value-type="string">
            <text:p>{"id":"2-26","name":"ハリエット・ビーチャー・ストウ","imageUrl":"https://one-draw.jp/ijinden/cardlist/002/card/02_026.png","expansion":25,"type":1,"level":2,"color":4,"term":2,"trait":0,"legacy":4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60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JSON.$A$1];[.$C160];[$JSON.$B$1];[.$E160];[$JSON.$C$1];[.$T160];[$JSON.$D$1];[.$G160];[$JSON.$E$1];[.$I160];[$JSON.$F$1];[.$L160];[$JSON.$G$1];[.$K160];[$JSON.$H$1];[.$O160];[$JSON.$I$1];[.$Q160];[$JSON.$J$1];[.$S160];[$JSON.$K$1];[.$A160];[$JSON.$L$1];[.$B160];[$JSON.$M$1])" office:value-type="string" office:string-value="{&quot;id&quot;:&quot;2-27&quot;,&quot;name&quot;:&quot;コシャマイン&quot;,&quot;imageUrl&quot;:&quot;https://one-draw.jp/ijinden/cardlist/002/card/02_027.png&quot;,&quot;expansion&quot;:25,&quot;type&quot;:1,&quot;level&quot;:3,&quot;color&quot;:4,&quot;term&quot;:4,&quot;trait&quot;:0,&quot;legacy&quot;:6,&quot;orderTable&quot;:159,&quot;orderDeck&quot;:89}," calcext:value-type="string">
            <text:p>{"id":"2-27","name":"コシャマイン","imageUrl":"https://one-draw.jp/ijinden/cardlist/002/card/02_027.png","expansion":25,"type":1,"level":3,"color":4,"term":4,"trait":0,"legacy":6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1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JSON.$A$1];[.$C161];[$JSON.$B$1];[.$E161];[$JSON.$C$1];[.$T161];[$JSON.$D$1];[.$G161];[$JSON.$E$1];[.$I161];[$JSON.$F$1];[.$L161];[$JSON.$G$1];[.$K161];[$JSON.$H$1];[.$O161];[$JSON.$I$1];[.$Q161];[$JSON.$J$1];[.$S161];[$JSON.$K$1];[.$A161];[$JSON.$L$1];[.$B161];[$JSON.$M$1])" office:value-type="string" office:string-value="{&quot;id&quot;:&quot;2-28&quot;,&quot;name&quot;:&quot;狩野山楽&quot;,&quot;imageUrl&quot;:&quot;https://one-draw.jp/ijinden/cardlist/002/card/02_028.png&quot;,&quot;expansion&quot;:25,&quot;type&quot;:1,&quot;level&quot;:7,&quot;color&quot;:4,&quot;term&quot;:0,&quot;trait&quot;:2,&quot;legacy&quot;:4,&quot;orderTable&quot;:160,&quot;orderDeck&quot;:210}," calcext:value-type="string">
            <text:p>{"id":"2-28","name":"狩野山楽","imageUrl":"https://one-draw.jp/ijinden/cardlist/002/card/02_028.png","expansion":25,"type":1,"level":7,"color":4,"term":0,"trait":2,"legacy":4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JSON.$A$1];[.$C162];[$JSON.$B$1];[.$E162];[$JSON.$C$1];[.$T162];[$JSON.$D$1];[.$G162];[$JSON.$E$1];[.$I162];[$JSON.$F$1];[.$L162];[$JSON.$G$1];[.$K162];[$JSON.$H$1];[.$O162];[$JSON.$I$1];[.$Q162];[$JSON.$J$1];[.$S162];[$JSON.$K$1];[.$A162];[$JSON.$L$1];[.$B162];[$JSON.$M$1])" office:value-type="string" office:string-value="{&quot;id&quot;:&quot;2-29&quot;,&quot;name&quot;:&quot;徳川家光&quot;,&quot;imageUrl&quot;:&quot;https://one-draw.jp/ijinden/cardlist/002/card/02_029.png&quot;,&quot;expansion&quot;:25,&quot;type&quot;:1,&quot;level&quot;:4,&quot;color&quot;:4,&quot;term&quot;:0,&quot;trait&quot;:0,&quot;legacy&quot;:4,&quot;orderTable&quot;:161,&quot;orderDeck&quot;:128}," calcext:value-type="string">
            <text:p>{"id":"2-29","name":"徳川家光","imageUrl":"https://one-draw.jp/ijinden/cardlist/002/card/02_029.png","expansion":25,"type":1,"level":4,"color":4,"term":0,"trait":0,"legacy":4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JSON.$A$1];[.$C163];[$JSON.$B$1];[.$E163];[$JSON.$C$1];[.$T163];[$JSON.$D$1];[.$G163];[$JSON.$E$1];[.$I163];[$JSON.$F$1];[.$L163];[$JSON.$G$1];[.$K163];[$JSON.$H$1];[.$O163];[$JSON.$I$1];[.$Q163];[$JSON.$J$1];[.$S163];[$JSON.$K$1];[.$A163];[$JSON.$L$1];[.$B163];[$JSON.$M$1])" office:value-type="string" office:string-value="{&quot;id&quot;:&quot;2-30&quot;,&quot;name&quot;:&quot;徳川綱吉&quot;,&quot;imageUrl&quot;:&quot;https://one-draw.jp/ijinden/cardlist/002/card/02_030.png&quot;,&quot;expansion&quot;:25,&quot;type&quot;:1,&quot;level&quot;:5,&quot;color&quot;:4,&quot;term&quot;:0,&quot;trait&quot;:0,&quot;legacy&quot;:4,&quot;orderTable&quot;:162,&quot;orderDeck&quot;:168}," calcext:value-type="string">
            <text:p>{"id":"2-30","name":"徳川綱吉","imageUrl":"https://one-draw.jp/ijinden/cardlist/002/card/02_030.png","expansion":25,"type":1,"level":5,"color":4,"term":0,"trait":0,"legacy":4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4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JSON.$A$1];[.$C164];[$JSON.$B$1];[.$E164];[$JSON.$C$1];[.$T164];[$JSON.$D$1];[.$G164];[$JSON.$E$1];[.$I164];[$JSON.$F$1];[.$L164];[$JSON.$G$1];[.$K164];[$JSON.$H$1];[.$O164];[$JSON.$I$1];[.$Q164];[$JSON.$J$1];[.$S164];[$JSON.$K$1];[.$A164];[$JSON.$L$1];[.$B164];[$JSON.$M$1])" office:value-type="string" office:string-value="{&quot;id&quot;:&quot;2-31&quot;,&quot;name&quot;:&quot;東洲斎写楽&quot;,&quot;imageUrl&quot;:&quot;https://one-draw.jp/ijinden/cardlist/002/card/02_031.png&quot;,&quot;expansion&quot;:25,&quot;type&quot;:1,&quot;level&quot;:8,&quot;color&quot;:4,&quot;term&quot;:0,&quot;trait&quot;:2,&quot;legacy&quot;:4,&quot;orderTable&quot;:163,&quot;orderDeck&quot;:223}," calcext:value-type="string">
            <text:p>{"id":"2-31","name":"東洲斎写楽","imageUrl":"https://one-draw.jp/ijinden/cardlist/002/card/02_031.png","expansion":25,"type":1,"level":8,"color":4,"term":0,"trait":2,"legacy":4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6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JSON.$A$1];[.$C165];[$JSON.$B$1];[.$E165];[$JSON.$C$1];[.$T165];[$JSON.$D$1];[.$G165];[$JSON.$E$1];[.$I165];[$JSON.$F$1];[.$L165];[$JSON.$G$1];[.$K165];[$JSON.$H$1];[.$O165];[$JSON.$I$1];[.$Q165];[$JSON.$J$1];[.$S165];[$JSON.$K$1];[.$A165];[$JSON.$L$1];[.$B165];[$JSON.$M$1])" office:value-type="string" office:string-value="{&quot;id&quot;:&quot;2-32&quot;,&quot;name&quot;:&quot;曹操&quot;,&quot;imageUrl&quot;:&quot;https://one-draw.jp/ijinden/cardlist/002/card/02_032.png&quot;,&quot;expansion&quot;:25,&quot;type&quot;:1,&quot;level&quot;:4,&quot;color&quot;:8,&quot;term&quot;:8,&quot;trait&quot;:0,&quot;legacy&quot;:0,&quot;orderTable&quot;:164,&quot;orderDeck&quot;:134}," calcext:value-type="string">
            <text:p>{"id":"2-32","name":"曹操","imageUrl":"https://one-draw.jp/ijinden/cardlist/002/card/02_032.png","expansion":25,"type":1,"level":4,"color":8,"term":8,"trait":0,"legacy":0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66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JSON.$A$1];[.$C166];[$JSON.$B$1];[.$E166];[$JSON.$C$1];[.$T166];[$JSON.$D$1];[.$G166];[$JSON.$E$1];[.$I166];[$JSON.$F$1];[.$L166];[$JSON.$G$1];[.$K166];[$JSON.$H$1];[.$O166];[$JSON.$I$1];[.$Q166];[$JSON.$J$1];[.$S166];[$JSON.$K$1];[.$A166];[$JSON.$L$1];[.$B166];[$JSON.$M$1])" office:value-type="string" office:string-value="{&quot;id&quot;:&quot;2-33&quot;,&quot;name&quot;:&quot;張角&quot;,&quot;imageUrl&quot;:&quot;https://one-draw.jp/ijinden/cardlist/002/card/02_033.png&quot;,&quot;expansion&quot;:25,&quot;type&quot;:1,&quot;level&quot;:2,&quot;color&quot;:8,&quot;term&quot;:0,&quot;trait&quot;:0,&quot;legacy&quot;:6,&quot;orderTable&quot;:165,&quot;orderDeck&quot;:54}," calcext:value-type="string">
            <text:p>{"id":"2-33","name":"張角","imageUrl":"https://one-draw.jp/ijinden/cardlist/002/card/02_033.png","expansion":25,"type":1,"level":2,"color":8,"term":0,"trait":0,"legacy":6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JSON.$A$1];[.$C167];[$JSON.$B$1];[.$E167];[$JSON.$C$1];[.$T167];[$JSON.$D$1];[.$G167];[$JSON.$E$1];[.$I167];[$JSON.$F$1];[.$L167];[$JSON.$G$1];[.$K167];[$JSON.$H$1];[.$O167];[$JSON.$I$1];[.$Q167];[$JSON.$J$1];[.$S167];[$JSON.$K$1];[.$A167];[$JSON.$L$1];[.$B167];[$JSON.$M$1])" office:value-type="string" office:string-value="{&quot;id&quot;:&quot;2-34&quot;,&quot;name&quot;:&quot;劉備&quot;,&quot;imageUrl&quot;:&quot;https://one-draw.jp/ijinden/cardlist/002/card/02_034.png&quot;,&quot;expansion&quot;:25,&quot;type&quot;:1,&quot;level&quot;:3,&quot;color&quot;:8,&quot;term&quot;:0,&quot;trait&quot;:0,&quot;legacy&quot;:4,&quot;orderTable&quot;:166,&quot;orderDeck&quot;:94}," calcext:value-type="string">
            <text:p>{"id":"2-34","name":"劉備","imageUrl":"https://one-draw.jp/ijinden/cardlist/002/card/02_034.png","expansion":25,"type":1,"level":3,"color":8,"term":0,"trait":0,"legacy":4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6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JSON.$A$1];[.$C168];[$JSON.$B$1];[.$E168];[$JSON.$C$1];[.$T168];[$JSON.$D$1];[.$G168];[$JSON.$E$1];[.$I168];[$JSON.$F$1];[.$L168];[$JSON.$G$1];[.$K168];[$JSON.$H$1];[.$O168];[$JSON.$I$1];[.$Q168];[$JSON.$J$1];[.$S168];[$JSON.$K$1];[.$A168];[$JSON.$L$1];[.$B168];[$JSON.$M$1])" office:value-type="string" office:string-value="{&quot;id&quot;:&quot;2-35&quot;,&quot;name&quot;:&quot;司馬懿&quot;,&quot;imageUrl&quot;:&quot;https://one-draw.jp/ijinden/cardlist/002/card/02_035.png&quot;,&quot;expansion&quot;:25,&quot;type&quot;:1,&quot;level&quot;:5,&quot;color&quot;:8,&quot;term&quot;:0,&quot;trait&quot;:0,&quot;legacy&quot;:4,&quot;orderTable&quot;:167,&quot;orderDeck&quot;:172}," calcext:value-type="string">
            <text:p>{"id":"2-35","name":"司馬懿","imageUrl":"https://one-draw.jp/ijinden/cardlist/002/card/02_035.png","expansion":25,"type":1,"level":5,"color":8,"term":0,"trait":0,"legacy":4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6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JSON.$A$1];[.$C169];[$JSON.$B$1];[.$E169];[$JSON.$C$1];[.$T169];[$JSON.$D$1];[.$G169];[$JSON.$E$1];[.$I169];[$JSON.$F$1];[.$L169];[$JSON.$G$1];[.$K169];[$JSON.$H$1];[.$O169];[$JSON.$I$1];[.$Q169];[$JSON.$J$1];[.$S169];[$JSON.$K$1];[.$A169];[$JSON.$L$1];[.$B169];[$JSON.$M$1])" office:value-type="string" office:string-value="{&quot;id&quot;:&quot;2-36&quot;,&quot;name&quot;:&quot;足利義政&quot;,&quot;imageUrl&quot;:&quot;https://one-draw.jp/ijinden/cardlist/002/card/02_036.png&quot;,&quot;expansion&quot;:25,&quot;type&quot;:1,&quot;level&quot;:7,&quot;color&quot;:8,&quot;term&quot;:0,&quot;trait&quot;:0,&quot;legacy&quot;:1,&quot;orderTable&quot;:168,&quot;orderDeck&quot;:215}," calcext:value-type="string">
            <text:p>{"id":"2-36","name":"足利義政","imageUrl":"https://one-draw.jp/ijinden/cardlist/002/card/02_036.png","expansion":25,"type":1,"level":7,"color":8,"term":0,"trait":0,"legacy":1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7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JSON.$A$1];[.$C170];[$JSON.$B$1];[.$E170];[$JSON.$C$1];[.$T170];[$JSON.$D$1];[.$G170];[$JSON.$E$1];[.$I170];[$JSON.$F$1];[.$L170];[$JSON.$G$1];[.$K170];[$JSON.$H$1];[.$O170];[$JSON.$I$1];[.$Q170];[$JSON.$J$1];[.$S170];[$JSON.$K$1];[.$A170];[$JSON.$L$1];[.$B170];[$JSON.$M$1])" office:value-type="string" office:string-value="{&quot;id&quot;:&quot;2-37&quot;,&quot;name&quot;:&quot;姜維&quot;,&quot;imageUrl&quot;:&quot;https://one-draw.jp/ijinden/cardlist/002/card/02_037.png&quot;,&quot;expansion&quot;:25,&quot;type&quot;:1,&quot;level&quot;:9,&quot;color&quot;:8,&quot;term&quot;:0,&quot;trait&quot;:0,&quot;legacy&quot;:0,&quot;orderTable&quot;:169,&quot;orderDeck&quot;:232}," calcext:value-type="string">
            <text:p>{"id":"2-37","name":"姜維","imageUrl":"https://one-draw.jp/ijinden/cardlist/002/card/02_037.png","expansion":25,"type":1,"level":9,"color":8,"term":0,"trait":0,"legacy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7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JSON.$A$1];[.$C171];[$JSON.$B$1];[.$E171];[$JSON.$C$1];[.$T171];[$JSON.$D$1];[.$G171];[$JSON.$E$1];[.$I171];[$JSON.$F$1];[.$L171];[$JSON.$G$1];[.$K171];[$JSON.$H$1];[.$O171];[$JSON.$I$1];[.$Q171];[$JSON.$J$1];[.$S171];[$JSON.$K$1];[.$A171];[$JSON.$L$1];[.$B171];[$JSON.$M$1])" office:value-type="string" office:string-value="{&quot;id&quot;:&quot;2-38&quot;,&quot;name&quot;:&quot;裴松之&quot;,&quot;imageUrl&quot;:&quot;https://one-draw.jp/ijinden/cardlist/002/card/02_038.png&quot;,&quot;expansion&quot;:25,&quot;type&quot;:1,&quot;level&quot;:8,&quot;color&quot;:8,&quot;term&quot;:2,&quot;trait&quot;:0,&quot;legacy&quot;:1,&quot;orderTable&quot;:170,&quot;orderDeck&quot;:225}," calcext:value-type="string">
            <text:p>{"id":"2-38","name":"裴松之","imageUrl":"https://one-draw.jp/ijinden/cardlist/002/card/02_038.png","expansion":25,"type":1,"level":8,"color":8,"term":2,"trait":0,"legacy":1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JSON.$A$1];[.$C172];[$JSON.$B$1];[.$E172];[$JSON.$C$1];[.$T172];[$JSON.$D$1];[.$G172];[$JSON.$E$1];[.$I172];[$JSON.$F$1];[.$L172];[$JSON.$G$1];[.$K172];[$JSON.$H$1];[.$O172];[$JSON.$I$1];[.$Q172];[$JSON.$J$1];[.$S172];[$JSON.$K$1];[.$A172];[$JSON.$L$1];[.$B172];[$JSON.$M$1])" office:value-type="string" office:string-value="{&quot;id&quot;:&quot;2-39&quot;,&quot;name&quot;:&quot;陳寿&quot;,&quot;imageUrl&quot;:&quot;https://one-draw.jp/ijinden/cardlist/002/card/02_039.png&quot;,&quot;expansion&quot;:25,&quot;type&quot;:1,&quot;level&quot;:1,&quot;color&quot;:8,&quot;term&quot;:2,&quot;trait&quot;:0,&quot;legacy&quot;:4,&quot;orderTable&quot;:171,&quot;orderDeck&quot;:16}," calcext:value-type="string">
            <text:p>{"id":"2-39","name":"陳寿","imageUrl":"https://one-draw.jp/ijinden/cardlist/002/card/02_039.png","expansion":25,"type":1,"level":1,"color":8,"term":2,"trait":0,"legacy":4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JSON.$A$1];[.$C173];[$JSON.$B$1];[.$E173];[$JSON.$C$1];[.$T173];[$JSON.$D$1];[.$G173];[$JSON.$E$1];[.$I173];[$JSON.$F$1];[.$L173];[$JSON.$G$1];[.$K173];[$JSON.$H$1];[.$O173];[$JSON.$I$1];[.$Q173];[$JSON.$J$1];[.$S173];[$JSON.$K$1];[.$A173];[$JSON.$L$1];[.$B173];[$JSON.$M$1])" office:value-type="string" office:string-value="{&quot;id&quot;:&quot;2-40&quot;,&quot;name&quot;:&quot;足利尊氏&quot;,&quot;imageUrl&quot;:&quot;https://one-draw.jp/ijinden/cardlist/002/card/02_040.png&quot;,&quot;expansion&quot;:25,&quot;type&quot;:1,&quot;level&quot;:1,&quot;color&quot;:8,&quot;term&quot;:0,&quot;trait&quot;:0,&quot;legacy&quot;:4,&quot;orderTable&quot;:172,&quot;orderDeck&quot;:17}," calcext:value-type="string">
            <text:p>{"id":"2-40","name":"足利尊氏","imageUrl":"https://one-draw.jp/ijinden/cardlist/002/card/02_040.png","expansion":25,"type":1,"level":1,"color":8,"term":0,"trait":0,"legacy":4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17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JSON.$A$1];[.$C174];[$JSON.$B$1];[.$E174];[$JSON.$C$1];[.$T174];[$JSON.$D$1];[.$G174];[$JSON.$E$1];[.$I174];[$JSON.$F$1];[.$L174];[$JSON.$G$1];[.$K174];[$JSON.$H$1];[.$O174];[$JSON.$I$1];[.$Q174];[$JSON.$J$1];[.$S174];[$JSON.$K$1];[.$A174];[$JSON.$L$1];[.$B174];[$JSON.$M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level&quot;:1,&quot;color&quot;:8,&quot;term&quot;:0,&quot;trait&quot;:0,&quot;legacy&quot;:6,&quot;orderTable&quot;:173,&quot;orderDeck&quot;:18}," calcext:value-type="string">
            <text:p>{"id":"2-41","name":"カール・マルクス","imageUrl":"https://one-draw.jp/ijinden/cardlist/002/card/02_041.png","expansion":25,"type":1,"level":1,"color":8,"term":0,"trait":0,"legacy":6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JSON.$A$1];[.$C175];[$JSON.$B$1];[.$E175];[$JSON.$C$1];[.$T175];[$JSON.$D$1];[.$G175];[$JSON.$E$1];[.$I175];[$JSON.$F$1];[.$L175];[$JSON.$G$1];[.$K175];[$JSON.$H$1];[.$O175];[$JSON.$I$1];[.$Q175];[$JSON.$J$1];[.$S175];[$JSON.$K$1];[.$A175];[$JSON.$L$1];[.$B175];[$JSON.$M$1])" office:value-type="string" office:string-value="{&quot;id&quot;:&quot;2-42&quot;,&quot;name&quot;:&quot;足利義満&quot;,&quot;imageUrl&quot;:&quot;https://one-draw.jp/ijinden/cardlist/002/card/02_042.png&quot;,&quot;expansion&quot;:25,&quot;type&quot;:1,&quot;level&quot;:3,&quot;color&quot;:8,&quot;term&quot;:0,&quot;trait&quot;:0,&quot;legacy&quot;:4,&quot;orderTable&quot;:174,&quot;orderDeck&quot;:95}," calcext:value-type="string">
            <text:p>{"id":"2-42","name":"足利義満","imageUrl":"https://one-draw.jp/ijinden/cardlist/002/card/02_042.png","expansion":25,"type":1,"level":3,"color":8,"term":0,"trait":0,"legacy":4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JSON.$A$1];[.$C176];[$JSON.$B$1];[.$E176];[$JSON.$C$1];[.$T176];[$JSON.$D$1];[.$G176];[$JSON.$E$1];[.$I176];[$JSON.$F$1];[.$L176];[$JSON.$G$1];[.$K176];[$JSON.$H$1];[.$O176];[$JSON.$I$1];[.$Q176];[$JSON.$J$1];[.$S176];[$JSON.$K$1];[.$A176];[$JSON.$L$1];[.$B176];[$JSON.$M$1])" office:value-type="string" office:string-value="{&quot;id&quot;:&quot;2-43&quot;,&quot;name&quot;:&quot;観阿弥&quot;,&quot;imageUrl&quot;:&quot;https://one-draw.jp/ijinden/cardlist/002/card/02_043.png&quot;,&quot;expansion&quot;:25,&quot;type&quot;:1,&quot;level&quot;:3,&quot;color&quot;:8,&quot;term&quot;:0,&quot;trait&quot;:0,&quot;legacy&quot;:4,&quot;orderTable&quot;:175,&quot;orderDeck&quot;:96}," calcext:value-type="string">
            <text:p>{"id":"2-43","name":"観阿弥","imageUrl":"https://one-draw.jp/ijinden/cardlist/002/card/02_043.png","expansion":25,"type":1,"level":3,"color":8,"term":0,"trait":0,"legacy":4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JSON.$A$1];[.$C177];[$JSON.$B$1];[.$E177];[$JSON.$C$1];[.$T177];[$JSON.$D$1];[.$G177];[$JSON.$E$1];[.$I177];[$JSON.$F$1];[.$L177];[$JSON.$G$1];[.$K177];[$JSON.$H$1];[.$O177];[$JSON.$I$1];[.$Q177];[$JSON.$J$1];[.$S177];[$JSON.$K$1];[.$A177];[$JSON.$L$1];[.$B177];[$JSON.$M$1])" office:value-type="string" office:string-value="{&quot;id&quot;:&quot;2-44&quot;,&quot;name&quot;:&quot;世阿弥&quot;,&quot;imageUrl&quot;:&quot;https://one-draw.jp/ijinden/cardlist/002/card/02_044.png&quot;,&quot;expansion&quot;:25,&quot;type&quot;:1,&quot;level&quot;:4,&quot;color&quot;:8,&quot;term&quot;:0,&quot;trait&quot;:0,&quot;legacy&quot;:4,&quot;orderTable&quot;:176,&quot;orderDeck&quot;:135}," calcext:value-type="string">
            <text:p>{"id":"2-44","name":"世阿弥","imageUrl":"https://one-draw.jp/ijinden/cardlist/002/card/02_044.png","expansion":25,"type":1,"level":4,"color":8,"term":0,"trait":0,"legacy":4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JSON.$A$1];[.$C178];[$JSON.$B$1];[.$E178];[$JSON.$C$1];[.$T178];[$JSON.$D$1];[.$G178];[$JSON.$E$1];[.$I178];[$JSON.$F$1];[.$L178];[$JSON.$G$1];[.$K178];[$JSON.$H$1];[.$O178];[$JSON.$I$1];[.$Q178];[$JSON.$J$1];[.$S178];[$JSON.$K$1];[.$A178];[$JSON.$L$1];[.$B178];[$JSON.$M$1])" office:value-type="string" office:string-value="{&quot;id&quot;:&quot;2-45&quot;,&quot;name&quot;:&quot;新井白石&quot;,&quot;imageUrl&quot;:&quot;https://one-draw.jp/ijinden/cardlist/002/card/02_045.png&quot;,&quot;expansion&quot;:25,&quot;type&quot;:1,&quot;level&quot;:2,&quot;color&quot;:8,&quot;term&quot;:0,&quot;trait&quot;:0,&quot;legacy&quot;:4,&quot;orderTable&quot;:177,&quot;orderDeck&quot;:55}," calcext:value-type="string">
            <text:p>{"id":"2-45","name":"新井白石","imageUrl":"https://one-draw.jp/ijinden/cardlist/002/card/02_045.png","expansion":25,"type":1,"level":2,"color":8,"term":0,"trait":0,"legacy":4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17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JSON.$A$1];[.$C179];[$JSON.$B$1];[.$E179];[$JSON.$C$1];[.$T179];[$JSON.$D$1];[.$G179];[$JSON.$E$1];[.$I179];[$JSON.$F$1];[.$L179];[$JSON.$G$1];[.$K179];[$JSON.$H$1];[.$O179];[$JSON.$I$1];[.$Q179];[$JSON.$J$1];[.$S179];[$JSON.$K$1];[.$A179];[$JSON.$L$1];[.$B179];[$JSON.$M$1])" office:value-type="string" office:string-value="{&quot;id&quot;:&quot;2-46&quot;,&quot;name&quot;:&quot;孫夫人&quot;,&quot;imageUrl&quot;:&quot;https://one-draw.jp/ijinden/cardlist/002/card/02_046.png&quot;,&quot;expansion&quot;:25,&quot;type&quot;:1,&quot;level&quot;:4,&quot;color&quot;:8,&quot;term&quot;:0,&quot;trait&quot;:0,&quot;legacy&quot;:4,&quot;orderTable&quot;:178,&quot;orderDeck&quot;:136}," calcext:value-type="string">
            <text:p>{"id":"2-46","name":"孫夫人","imageUrl":"https://one-draw.jp/ijinden/cardlist/002/card/02_046.png","expansion":25,"type":1,"level":4,"color":8,"term":0,"trait":0,"legacy":4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JSON.$A$1];[.$C180];[$JSON.$B$1];[.$E180];[$JSON.$C$1];[.$T180];[$JSON.$D$1];[.$G180];[$JSON.$E$1];[.$I180];[$JSON.$F$1];[.$L180];[$JSON.$G$1];[.$K180];[$JSON.$H$1];[.$O180];[$JSON.$I$1];[.$Q180];[$JSON.$J$1];[.$S180];[$JSON.$K$1];[.$A180];[$JSON.$L$1];[.$B180];[$JSON.$M$1])" office:value-type="string" office:string-value="{&quot;id&quot;:&quot;2-47&quot;,&quot;name&quot;:&quot;法然&quot;,&quot;imageUrl&quot;:&quot;https://one-draw.jp/ijinden/cardlist/002/card/02_047.png&quot;,&quot;expansion&quot;:25,&quot;type&quot;:1,&quot;level&quot;:3,&quot;color&quot;:8,&quot;term&quot;:0,&quot;trait&quot;:0,&quot;legacy&quot;:7,&quot;orderTable&quot;:179,&quot;orderDeck&quot;:97}," calcext:value-type="string">
            <text:p>{"id":"2-47","name":"法然","imageUrl":"https://one-draw.jp/ijinden/cardlist/002/card/02_047.png","expansion":25,"type":1,"level":3,"color":8,"term":0,"trait":0,"legacy":7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1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JSON.$A$1];[.$C181];[$JSON.$B$1];[.$E181];[$JSON.$C$1];[.$T181];[$JSON.$D$1];[.$G181];[$JSON.$E$1];[.$I181];[$JSON.$F$1];[.$L181];[$JSON.$G$1];[.$K181];[$JSON.$H$1];[.$O181];[$JSON.$I$1];[.$Q181];[$JSON.$J$1];[.$S181];[$JSON.$K$1];[.$A181];[$JSON.$L$1];[.$B181];[$JSON.$M$1])" office:value-type="string" office:string-value="{&quot;id&quot;:&quot;2-48&quot;,&quot;name&quot;:&quot;一遍&quot;,&quot;imageUrl&quot;:&quot;https://one-draw.jp/ijinden/cardlist/002/card/02_048.png&quot;,&quot;expansion&quot;:25,&quot;type&quot;:1,&quot;level&quot;:5,&quot;color&quot;:8,&quot;term&quot;:0,&quot;trait&quot;:0,&quot;legacy&quot;:7,&quot;orderTable&quot;:180,&quot;orderDeck&quot;:173}," calcext:value-type="string">
            <text:p>{"id":"2-48","name":"一遍","imageUrl":"https://one-draw.jp/ijinden/cardlist/002/card/02_048.png","expansion":25,"type":1,"level":5,"color":8,"term":0,"trait":0,"legacy":7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8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JSON.$A$1];[.$C182];[$JSON.$B$1];[.$E182];[$JSON.$C$1];[.$T182];[$JSON.$D$1];[.$G182];[$JSON.$E$1];[.$I182];[$JSON.$F$1];[.$L182];[$JSON.$G$1];[.$K182];[$JSON.$H$1];[.$O182];[$JSON.$I$1];[.$Q182];[$JSON.$J$1];[.$S182];[$JSON.$K$1];[.$A182];[$JSON.$L$1];[.$B182];[$JSON.$M$1])" office:value-type="string" office:string-value="{&quot;id&quot;:&quot;2-49&quot;,&quot;name&quot;:&quot;籠城戦&quot;,&quot;imageUrl&quot;:&quot;https://one-draw.jp/ijinden/cardlist/002/card/02_049.png&quot;,&quot;expansion&quot;:25,&quot;type&quot;:2,&quot;level&quot;:2,&quot;color&quot;:1,&quot;term&quot;:4,&quot;trait&quot;:0,&quot;legacy&quot;:1,&quot;orderTable&quot;:181,&quot;orderDeck&quot;:240}," calcext:value-type="string">
            <text:p>{"id":"2-49","name":"籠城戦","imageUrl":"https://one-draw.jp/ijinden/cardlist/002/card/02_049.png","expansion":25,"type":2,"level":2,"color":1,"term":4,"trait":0,"legacy":1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JSON.$A$1];[.$C183];[$JSON.$B$1];[.$E183];[$JSON.$C$1];[.$T183];[$JSON.$D$1];[.$G183];[$JSON.$E$1];[.$I183];[$JSON.$F$1];[.$L183];[$JSON.$G$1];[.$K183];[$JSON.$H$1];[.$O183];[$JSON.$I$1];[.$Q183];[$JSON.$J$1];[.$S183];[$JSON.$K$1];[.$A183];[$JSON.$L$1];[.$B183];[$JSON.$M$1])" office:value-type="string" office:string-value="{&quot;id&quot;:&quot;2-50&quot;,&quot;name&quot;:&quot;安宅船&quot;,&quot;imageUrl&quot;:&quot;https://one-draw.jp/ijinden/cardlist/002/card/02_050.png&quot;,&quot;expansion&quot;:25,&quot;type&quot;:2,&quot;level&quot;:5,&quot;color&quot;:1,&quot;term&quot;:0,&quot;trait&quot;:0,&quot;legacy&quot;:0,&quot;orderTable&quot;:182,&quot;orderDeck&quot;:266}," calcext:value-type="string">
            <text:p>{"id":"2-50","name":"安宅船","imageUrl":"https://one-draw.jp/ijinden/cardlist/002/card/02_050.png","expansion":25,"type":2,"level":5,"color":1,"term":0,"trait":0,"legacy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84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8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JSON.$A$1];[.$C184];[$JSON.$B$1];[.$E184];[$JSON.$C$1];[.$T184];[$JSON.$D$1];[.$G184];[$JSON.$E$1];[.$I184];[$JSON.$F$1];[.$L184];[$JSON.$G$1];[.$K184];[$JSON.$H$1];[.$O184];[$JSON.$I$1];[.$Q184];[$JSON.$J$1];[.$S184];[$JSON.$K$1];[.$A184];[$JSON.$L$1];[.$B184];[$JSON.$M$1])" office:value-type="string" office:string-value="{&quot;id&quot;:&quot;2-51&quot;,&quot;name&quot;:&quot;リヴァイアサン&quot;,&quot;imageUrl&quot;:&quot;https://one-draw.jp/ijinden/cardlist/002/card/02_051.png&quot;,&quot;expansion&quot;:25,&quot;type&quot;:2,&quot;level&quot;:4,&quot;color&quot;:2,&quot;term&quot;:0,&quot;trait&quot;:8,&quot;legacy&quot;:5,&quot;orderTable&quot;:183,&quot;orderDeck&quot;:261}," calcext:value-type="string">
            <text:p>{"id":"2-51","name":"リヴァイアサン","imageUrl":"https://one-draw.jp/ijinden/cardlist/002/card/02_051.png","expansion":25,"type":2,"level":4,"color":2,"term":0,"trait":8,"legacy":5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JSON.$A$1];[.$C185];[$JSON.$B$1];[.$E185];[$JSON.$C$1];[.$T185];[$JSON.$D$1];[.$G185];[$JSON.$E$1];[.$I185];[$JSON.$F$1];[.$L185];[$JSON.$G$1];[.$K185];[$JSON.$H$1];[.$O185];[$JSON.$I$1];[.$Q185];[$JSON.$J$1];[.$S185];[$JSON.$K$1];[.$A185];[$JSON.$L$1];[.$B185];[$JSON.$M$1])" office:value-type="string" office:string-value="{&quot;id&quot;:&quot;2-52&quot;,&quot;name&quot;:&quot;ガレオン船&quot;,&quot;imageUrl&quot;:&quot;https://one-draw.jp/ijinden/cardlist/002/card/02_052.png&quot;,&quot;expansion&quot;:25,&quot;type&quot;:2,&quot;level&quot;:6,&quot;color&quot;:2,&quot;term&quot;:0,&quot;trait&quot;:0,&quot;legacy&quot;:0,&quot;orderTable&quot;:184,&quot;orderDeck&quot;:274}," calcext:value-type="string">
            <text:p>{"id":"2-52","name":"ガレオン船","imageUrl":"https://one-draw.jp/ijinden/cardlist/002/card/02_052.png","expansion":25,"type":2,"level":6,"color":2,"term":0,"trait":0,"legacy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8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JSON.$A$1];[.$C186];[$JSON.$B$1];[.$E186];[$JSON.$C$1];[.$T186];[$JSON.$D$1];[.$G186];[$JSON.$E$1];[.$I186];[$JSON.$F$1];[.$L186];[$JSON.$G$1];[.$K186];[$JSON.$H$1];[.$O186];[$JSON.$I$1];[.$Q186];[$JSON.$J$1];[.$S186];[$JSON.$K$1];[.$A186];[$JSON.$L$1];[.$B186];[$JSON.$M$1])" office:value-type="string" office:string-value="{&quot;id&quot;:&quot;2-53&quot;,&quot;name&quot;:&quot;仁王&quot;,&quot;imageUrl&quot;:&quot;https://one-draw.jp/ijinden/cardlist/002/card/02_053.png&quot;,&quot;expansion&quot;:25,&quot;type&quot;:2,&quot;level&quot;:2,&quot;color&quot;:4,&quot;term&quot;:0,&quot;trait&quot;:0,&quot;legacy&quot;:1,&quot;orderTable&quot;:185,&quot;orderDeck&quot;:244}," calcext:value-type="string">
            <text:p>{"id":"2-53","name":"仁王","imageUrl":"https://one-draw.jp/ijinden/cardlist/002/card/02_053.png","expansion":25,"type":2,"level":2,"color":4,"term":0,"trait":0,"legacy":1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8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JSON.$A$1];[.$C187];[$JSON.$B$1];[.$E187];[$JSON.$C$1];[.$T187];[$JSON.$D$1];[.$G187];[$JSON.$E$1];[.$I187];[$JSON.$F$1];[.$L187];[$JSON.$G$1];[.$K187];[$JSON.$H$1];[.$O187];[$JSON.$I$1];[.$Q187];[$JSON.$J$1];[.$S187];[$JSON.$K$1];[.$A187];[$JSON.$L$1];[.$B187];[$JSON.$M$1])" office:value-type="string" office:string-value="{&quot;id&quot;:&quot;2-54&quot;,&quot;name&quot;:&quot;蒸気機関車&quot;,&quot;imageUrl&quot;:&quot;https://one-draw.jp/ijinden/cardlist/002/card/02_054.png&quot;,&quot;expansion&quot;:25,&quot;type&quot;:2,&quot;level&quot;:7,&quot;color&quot;:4,&quot;term&quot;:0,&quot;trait&quot;:0,&quot;legacy&quot;:0,&quot;orderTable&quot;:186,&quot;orderDeck&quot;:279}," calcext:value-type="string">
            <text:p>{"id":"2-54","name":"蒸気機関車","imageUrl":"https://one-draw.jp/ijinden/cardlist/002/card/02_054.png","expansion":25,"type":2,"level":7,"color":4,"term":0,"trait":0,"legacy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JSON.$A$1];[.$C188];[$JSON.$B$1];[.$E188];[$JSON.$C$1];[.$T188];[$JSON.$D$1];[.$G188];[$JSON.$E$1];[.$I188];[$JSON.$F$1];[.$L188];[$JSON.$G$1];[.$K188];[$JSON.$H$1];[.$O188];[$JSON.$I$1];[.$Q188];[$JSON.$J$1];[.$S188];[$JSON.$K$1];[.$A188];[$JSON.$L$1];[.$B188];[$JSON.$M$1])" office:value-type="string" office:string-value="{&quot;id&quot;:&quot;2-55&quot;,&quot;name&quot;:&quot;凱旋門&quot;,&quot;imageUrl&quot;:&quot;https://one-draw.jp/ijinden/cardlist/002/card/02_055.png&quot;,&quot;expansion&quot;:25,&quot;type&quot;:2,&quot;level&quot;:2,&quot;color&quot;:8,&quot;term&quot;:0,&quot;trait&quot;:0,&quot;legacy&quot;:7,&quot;orderTable&quot;:187,&quot;orderDeck&quot;:246}," calcext:value-type="string">
            <text:p>{"id":"2-55","name":"凱旋門","imageUrl":"https://one-draw.jp/ijinden/cardlist/002/card/02_055.png","expansion":25,"type":2,"level":2,"color":8,"term":0,"trait":0,"legacy":7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189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JSON.$A$1];[.$C189];[$JSON.$B$1];[.$E189];[$JSON.$C$1];[.$T189];[$JSON.$D$1];[.$G189];[$JSON.$E$1];[.$I189];[$JSON.$F$1];[.$L189];[$JSON.$G$1];[.$K189];[$JSON.$H$1];[.$O189];[$JSON.$I$1];[.$Q189];[$JSON.$J$1];[.$S189];[$JSON.$K$1];[.$A189];[$JSON.$L$1];[.$B189];[$JSON.$M$1])" office:value-type="string" office:string-value="{&quot;id&quot;:&quot;2-56&quot;,&quot;name&quot;:&quot;三層の舎利殿&quot;,&quot;imageUrl&quot;:&quot;https://one-draw.jp/ijinden/cardlist/002/card/02_056.png&quot;,&quot;expansion&quot;:25,&quot;type&quot;:2,&quot;level&quot;:3,&quot;color&quot;:8,&quot;term&quot;:0,&quot;trait&quot;:0,&quot;legacy&quot;:7,&quot;orderTable&quot;:188,&quot;orderDeck&quot;:256}," calcext:value-type="string">
            <text:p>{"id":"2-56","name":"三層の舎利殿","imageUrl":"https://one-draw.jp/ijinden/cardlist/002/card/02_056.png","expansion":25,"type":2,"level":3,"color":8,"term":0,"trait":0,"legacy":7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JSON.$A$1];[.$C190];[$JSON.$B$1];[.$E190];[$JSON.$C$1];[.$T190];[$JSON.$D$1];[.$G190];[$JSON.$E$1];[.$I190];[$JSON.$F$1];[.$L190];[$JSON.$G$1];[.$K190];[$JSON.$H$1];[.$O190];[$JSON.$I$1];[.$Q190];[$JSON.$J$1];[.$S190];[$JSON.$K$1];[.$A190];[$JSON.$L$1];[.$B190];[$JSON.$M$1])" office:value-type="string" office:string-value="{&quot;id&quot;:&quot;2-57&quot;,&quot;name&quot;:&quot;スペクター&quot;,&quot;imageUrl&quot;:&quot;https://one-draw.jp/ijinden/cardlist/002/card/02_057.png&quot;,&quot;expansion&quot;:25,&quot;type&quot;:3,&quot;level&quot;:7,&quot;color&quot;:1,&quot;term&quot;:272,&quot;trait&quot;:0,&quot;legacy&quot;:0,&quot;orderTable&quot;:189,&quot;orderDeck&quot;:334}," calcext:value-type="string">
            <text:p>{"id":"2-57","name":"スペクター","imageUrl":"https://one-draw.jp/ijinden/cardlist/002/card/02_057.png","expansion":25,"type":3,"level":7,"color":1,"term":272,"trait":0,"legacy":0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19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JSON.$A$1];[.$C191];[$JSON.$B$1];[.$E191];[$JSON.$C$1];[.$T191];[$JSON.$D$1];[.$G191];[$JSON.$E$1];[.$I191];[$JSON.$F$1];[.$L191];[$JSON.$G$1];[.$K191];[$JSON.$H$1];[.$O191];[$JSON.$I$1];[.$Q191];[$JSON.$J$1];[.$S191];[$JSON.$K$1];[.$A191];[$JSON.$L$1];[.$B191];[$JSON.$M$1])" office:value-type="string" office:string-value="{&quot;id&quot;:&quot;2-58&quot;,&quot;name&quot;:&quot;クイック&quot;,&quot;imageUrl&quot;:&quot;https://one-draw.jp/ijinden/cardlist/002/card/02_058.png&quot;,&quot;expansion&quot;:25,&quot;type&quot;:3,&quot;level&quot;:2,&quot;color&quot;:1,&quot;term&quot;:0,&quot;trait&quot;:0,&quot;legacy&quot;:0,&quot;orderTable&quot;:190,&quot;orderDeck&quot;:292}," calcext:value-type="string">
            <text:p>{"id":"2-58","name":"クイック","imageUrl":"https://one-draw.jp/ijinden/cardlist/002/card/02_058.png","expansion":25,"type":3,"level":2,"color":1,"term":0,"trait":0,"legacy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JSON.$A$1];[.$C192];[$JSON.$B$1];[.$E192];[$JSON.$C$1];[.$T192];[$JSON.$D$1];[.$G192];[$JSON.$E$1];[.$I192];[$JSON.$F$1];[.$L192];[$JSON.$G$1];[.$K192];[$JSON.$H$1];[.$O192];[$JSON.$I$1];[.$Q192];[$JSON.$J$1];[.$S192];[$JSON.$K$1];[.$A192];[$JSON.$L$1];[.$B192];[$JSON.$M$1])" office:value-type="string" office:string-value="{&quot;id&quot;:&quot;2-59&quot;,&quot;name&quot;:&quot;サモン&quot;,&quot;imageUrl&quot;:&quot;https://one-draw.jp/ijinden/cardlist/002/card/02_059.png&quot;,&quot;expansion&quot;:25,&quot;type&quot;:3,&quot;level&quot;:3,&quot;color&quot;:1,&quot;term&quot;:0,&quot;trait&quot;:0,&quot;legacy&quot;:5,&quot;orderTable&quot;:191,&quot;orderDeck&quot;:306}," calcext:value-type="string">
            <text:p>{"id":"2-59","name":"サモン","imageUrl":"https://one-draw.jp/ijinden/cardlist/002/card/02_059.png","expansion":25,"type":3,"level":3,"color":1,"term":0,"trait":0,"legacy":5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JSON.$A$1];[.$C193];[$JSON.$B$1];[.$E193];[$JSON.$C$1];[.$T193];[$JSON.$D$1];[.$G193];[$JSON.$E$1];[.$I193];[$JSON.$F$1];[.$L193];[$JSON.$G$1];[.$K193];[$JSON.$H$1];[.$O193];[$JSON.$I$1];[.$Q193];[$JSON.$J$1];[.$S193];[$JSON.$K$1];[.$A193];[$JSON.$L$1];[.$B193];[$JSON.$M$1])" office:value-type="string" office:string-value="{&quot;id&quot;:&quot;2-60&quot;,&quot;name&quot;:&quot;フェイス&quot;,&quot;imageUrl&quot;:&quot;https://one-draw.jp/ijinden/cardlist/002/card/02_060.png&quot;,&quot;expansion&quot;:25,&quot;type&quot;:3,&quot;level&quot;:2,&quot;color&quot;:2,&quot;term&quot;:0,&quot;trait&quot;:0,&quot;legacy&quot;:5,&quot;orderTable&quot;:192,&quot;orderDeck&quot;:295}," calcext:value-type="string">
            <text:p>{"id":"2-60","name":"フェイス","imageUrl":"https://one-draw.jp/ijinden/cardlist/002/card/02_060.png","expansion":25,"type":3,"level":2,"color":2,"term":0,"trait":0,"legacy":5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JSON.$A$1];[.$C194];[$JSON.$B$1];[.$E194];[$JSON.$C$1];[.$T194];[$JSON.$D$1];[.$G194];[$JSON.$E$1];[.$I194];[$JSON.$F$1];[.$L194];[$JSON.$G$1];[.$K194];[$JSON.$H$1];[.$O194];[$JSON.$I$1];[.$Q194];[$JSON.$J$1];[.$S194];[$JSON.$K$1];[.$A194];[$JSON.$L$1];[.$B194];[$JSON.$M$1])" office:value-type="string" office:string-value="{&quot;id&quot;:&quot;2-61&quot;,&quot;name&quot;:&quot;リドロー&quot;,&quot;imageUrl&quot;:&quot;https://one-draw.jp/ijinden/cardlist/002/card/02_061.png&quot;,&quot;expansion&quot;:25,&quot;type&quot;:3,&quot;level&quot;:2,&quot;color&quot;:2,&quot;term&quot;:0,&quot;trait&quot;:0,&quot;legacy&quot;:2,&quot;orderTable&quot;:193,&quot;orderDeck&quot;:296}," calcext:value-type="string">
            <text:p>{"id":"2-61","name":"リドロー","imageUrl":"https://one-draw.jp/ijinden/cardlist/002/card/02_061.png","expansion":25,"type":3,"level":2,"color":2,"term":0,"trait":0,"legacy":2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JSON.$A$1];[.$C195];[$JSON.$B$1];[.$E195];[$JSON.$C$1];[.$T195];[$JSON.$D$1];[.$G195];[$JSON.$E$1];[.$I195];[$JSON.$F$1];[.$L195];[$JSON.$G$1];[.$K195];[$JSON.$H$1];[.$O195];[$JSON.$I$1];[.$Q195];[$JSON.$J$1];[.$S195];[$JSON.$K$1];[.$A195];[$JSON.$L$1];[.$B195];[$JSON.$M$1])" office:value-type="string" office:string-value="{&quot;id&quot;:&quot;2-62&quot;,&quot;name&quot;:&quot;テンペスト&quot;,&quot;imageUrl&quot;:&quot;https://one-draw.jp/ijinden/cardlist/002/card/02_062.png&quot;,&quot;expansion&quot;:25,&quot;type&quot;:3,&quot;level&quot;:4,&quot;color&quot;:2,&quot;term&quot;:0,&quot;trait&quot;:0,&quot;legacy&quot;:2,&quot;orderTable&quot;:194,&quot;orderDeck&quot;:320}," calcext:value-type="string">
            <text:p>{"id":"2-62","name":"テンペスト","imageUrl":"https://one-draw.jp/ijinden/cardlist/002/card/02_062.png","expansion":25,"type":3,"level":4,"color":2,"term":0,"trait":0,"legacy":2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9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JSON.$A$1];[.$C196];[$JSON.$B$1];[.$E196];[$JSON.$C$1];[.$T196];[$JSON.$D$1];[.$G196];[$JSON.$E$1];[.$I196];[$JSON.$F$1];[.$L196];[$JSON.$G$1];[.$K196];[$JSON.$H$1];[.$O196];[$JSON.$I$1];[.$Q196];[$JSON.$J$1];[.$S196];[$JSON.$K$1];[.$A196];[$JSON.$L$1];[.$B196];[$JSON.$M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level&quot;:4,&quot;color&quot;:4,&quot;term&quot;:0,&quot;trait&quot;:0,&quot;legacy&quot;:1,&quot;orderTable&quot;:195,&quot;orderDeck&quot;:322}," calcext:value-type="string">
            <text:p>{"id":"2-63","name":"ミューテイション","imageUrl":"https://one-draw.jp/ijinden/cardlist/002/card/02_063.png","expansion":25,"type":3,"level":4,"color":4,"term":0,"trait":0,"legacy":1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19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JSON.$A$1];[.$C197];[$JSON.$B$1];[.$E197];[$JSON.$C$1];[.$T197];[$JSON.$D$1];[.$G197];[$JSON.$E$1];[.$I197];[$JSON.$F$1];[.$L197];[$JSON.$G$1];[.$K197];[$JSON.$H$1];[.$O197];[$JSON.$I$1];[.$Q197];[$JSON.$J$1];[.$S197];[$JSON.$K$1];[.$A197];[$JSON.$L$1];[.$B197];[$JSON.$M$1])" office:value-type="string" office:string-value="{&quot;id&quot;:&quot;2-64&quot;,&quot;name&quot;:&quot;ライブラリー&quot;,&quot;imageUrl&quot;:&quot;https://one-draw.jp/ijinden/cardlist/002/card/02_064.png&quot;,&quot;expansion&quot;:25,&quot;type&quot;:3,&quot;level&quot;:5,&quot;color&quot;:4,&quot;term&quot;:0,&quot;trait&quot;:0,&quot;legacy&quot;:1,&quot;orderTable&quot;:196,&quot;orderDeck&quot;:329}," calcext:value-type="string">
            <text:p>{"id":"2-64","name":"ライブラリー","imageUrl":"https://one-draw.jp/ijinden/cardlist/002/card/02_064.png","expansion":25,"type":3,"level":5,"color":4,"term":0,"trait":0,"legacy":1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198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JSON.$A$1];[.$C198];[$JSON.$B$1];[.$E198];[$JSON.$C$1];[.$T198];[$JSON.$D$1];[.$G198];[$JSON.$E$1];[.$I198];[$JSON.$F$1];[.$L198];[$JSON.$G$1];[.$K198];[$JSON.$H$1];[.$O198];[$JSON.$I$1];[.$Q198];[$JSON.$J$1];[.$S198];[$JSON.$K$1];[.$A198];[$JSON.$L$1];[.$B198];[$JSON.$M$1])" office:value-type="string" office:string-value="{&quot;id&quot;:&quot;2-65&quot;,&quot;name&quot;:&quot;チャージ&quot;,&quot;imageUrl&quot;:&quot;https://one-draw.jp/ijinden/cardlist/002/card/02_065.png&quot;,&quot;expansion&quot;:25,&quot;type&quot;:3,&quot;level&quot;:1,&quot;color&quot;:4,&quot;term&quot;:0,&quot;trait&quot;:0,&quot;legacy&quot;:5,&quot;orderTable&quot;:197,&quot;orderDeck&quot;:284}," calcext:value-type="string">
            <text:p>{"id":"2-65","name":"チャージ","imageUrl":"https://one-draw.jp/ijinden/cardlist/002/card/02_065.png","expansion":25,"type":3,"level":1,"color":4,"term":0,"trait":0,"legacy":5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199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JSON.$A$1];[.$C199];[$JSON.$B$1];[.$E199];[$JSON.$C$1];[.$T199];[$JSON.$D$1];[.$G199];[$JSON.$E$1];[.$I199];[$JSON.$F$1];[.$L199];[$JSON.$G$1];[.$K199];[$JSON.$H$1];[.$O199];[$JSON.$I$1];[.$Q199];[$JSON.$J$1];[.$S199];[$JSON.$K$1];[.$A199];[$JSON.$L$1];[.$B199];[$JSON.$M$1])" office:value-type="string" office:string-value="{&quot;id&quot;:&quot;2-66&quot;,&quot;name&quot;:&quot;カタストロフィ&quot;,&quot;imageUrl&quot;:&quot;https://one-draw.jp/ijinden/cardlist/002/card/02_066.png&quot;,&quot;expansion&quot;:25,&quot;type&quot;:3,&quot;level&quot;:5,&quot;color&quot;:8,&quot;term&quot;:0,&quot;trait&quot;:0,&quot;legacy&quot;:2,&quot;orderTable&quot;:198,&quot;orderDeck&quot;:330}," calcext:value-type="string">
            <text:p>{"id":"2-66","name":"カタストロフィ","imageUrl":"https://one-draw.jp/ijinden/cardlist/002/card/02_066.png","expansion":25,"type":3,"level":5,"color":8,"term":0,"trait":0,"legacy":2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JSON.$A$1];[.$C200];[$JSON.$B$1];[.$E200];[$JSON.$C$1];[.$T200];[$JSON.$D$1];[.$G200];[$JSON.$E$1];[.$I200];[$JSON.$F$1];[.$L200];[$JSON.$G$1];[.$K200];[$JSON.$H$1];[.$O200];[$JSON.$I$1];[.$Q200];[$JSON.$J$1];[.$S200];[$JSON.$K$1];[.$A200];[$JSON.$L$1];[.$B200];[$JSON.$M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level&quot;:3,&quot;color&quot;:8,&quot;term&quot;:0,&quot;trait&quot;:0,&quot;legacy&quot;:2,&quot;orderTable&quot;:199,&quot;orderDeck&quot;:313}," calcext:value-type="string">
            <text:p>{"id":"2-67","name":"エクスキューション","imageUrl":"https://one-draw.jp/ijinden/cardlist/002/card/02_067.png","expansion":25,"type":3,"level":3,"color":8,"term":0,"trait":0,"legacy":2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JSON.$A$1];[.$C201];[$JSON.$B$1];[.$E201];[$JSON.$C$1];[.$T201];[$JSON.$D$1];[.$G201];[$JSON.$E$1];[.$I201];[$JSON.$F$1];[.$L201];[$JSON.$G$1];[.$K201];[$JSON.$H$1];[.$O201];[$JSON.$I$1];[.$Q201];[$JSON.$J$1];[.$S201];[$JSON.$K$1];[.$A201];[$JSON.$L$1];[.$B201];[$JSON.$M$1])" office:value-type="string" office:string-value="{&quot;id&quot;:&quot;2-68&quot;,&quot;name&quot;:&quot;メロウ&quot;,&quot;imageUrl&quot;:&quot;https://one-draw.jp/ijinden/cardlist/002/card/02_068.png&quot;,&quot;expansion&quot;:25,&quot;type&quot;:3,&quot;level&quot;:4,&quot;color&quot;:8,&quot;term&quot;:0,&quot;trait&quot;:0,&quot;legacy&quot;:2,&quot;orderTable&quot;:200,&quot;orderDeck&quot;:323}," calcext:value-type="string">
            <text:p>{"id":"2-68","name":"メロウ","imageUrl":"https://one-draw.jp/ijinden/cardlist/002/card/02_068.png","expansion":25,"type":3,"level":4,"color":8,"term":0,"trait":0,"legacy":2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JSON.$A$1];[.$C202];[$JSON.$B$1];[.$E202];[$JSON.$C$1];[.$T202];[$JSON.$D$1];[.$G202];[$JSON.$E$1];[.$I202];[$JSON.$F$1];[.$L202];[$JSON.$G$1];[.$K202];[$JSON.$H$1];[.$O202];[$JSON.$I$1];[.$Q202];[$JSON.$J$1];[.$S202];[$JSON.$K$1];[.$A202];[$JSON.$L$1];[.$B202];[$JSON.$M$1])" office:value-type="string" office:string-value="{&quot;id&quot;:&quot;2-69&quot;,&quot;name&quot;:&quot;スカーレット&quot;,&quot;imageUrl&quot;:&quot;https://one-draw.jp/ijinden/cardlist/002/card/02_069.png&quot;,&quot;expansion&quot;:25,&quot;type&quot;:3,&quot;level&quot;:3,&quot;color&quot;:8,&quot;term&quot;:48,&quot;trait&quot;:0,&quot;legacy&quot;:2,&quot;orderTable&quot;:201,&quot;orderDeck&quot;:314}," calcext:value-type="string">
            <text:p>{"id":"2-69","name":"スカーレット","imageUrl":"https://one-draw.jp/ijinden/cardlist/002/card/02_069.png","expansion":25,"type":3,"level":3,"color":8,"term":48,"trait":0,"legacy":2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JSON.$A$1];[.$C203];[$JSON.$B$1];[.$E203];[$JSON.$C$1];[.$T203];[$JSON.$D$1];[.$G203];[$JSON.$E$1];[.$I203];[$JSON.$F$1];[.$L203];[$JSON.$G$1];[.$K203];[$JSON.$H$1];[.$O203];[$JSON.$I$1];[.$Q203];[$JSON.$J$1];[.$S203];[$JSON.$K$1];[.$A203];[$JSON.$L$1];[.$B203];[$JSON.$M$1])" office:value-type="string" office:string-value="{&quot;id&quot;:&quot;2-70&quot;,&quot;name&quot;:&quot;ピーコック&quot;,&quot;imageUrl&quot;:&quot;https://one-draw.jp/ijinden/cardlist/002/card/02_070.png&quot;,&quot;expansion&quot;:25,&quot;type&quot;:3,&quot;level&quot;:3,&quot;color&quot;:8,&quot;term&quot;:80,&quot;trait&quot;:0,&quot;legacy&quot;:2,&quot;orderTable&quot;:202,&quot;orderDeck&quot;:315}," calcext:value-type="string">
            <text:p>{"id":"2-70","name":"ピーコック","imageUrl":"https://one-draw.jp/ijinden/cardlist/002/card/02_070.png","expansion":25,"type":3,"level":3,"color":8,"term":80,"trait":0,"legacy":2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0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JSON.$A$1];[.$C204];[$JSON.$B$1];[.$E204];[$JSON.$C$1];[.$T204];[$JSON.$D$1];[.$G204];[$JSON.$E$1];[.$I204];[$JSON.$F$1];[.$L204];[$JSON.$G$1];[.$K204];[$JSON.$H$1];[.$O204];[$JSON.$I$1];[.$Q204];[$JSON.$J$1];[.$S204];[$JSON.$K$1];[.$A204];[$JSON.$L$1];[.$B204];[$JSON.$M$1])" office:value-type="string" office:string-value="{&quot;id&quot;:&quot;2-71&quot;,&quot;name&quot;:&quot;シャトルーズ&quot;,&quot;imageUrl&quot;:&quot;https://one-draw.jp/ijinden/cardlist/002/card/02_071.png&quot;,&quot;expansion&quot;:25,&quot;type&quot;:3,&quot;level&quot;:3,&quot;color&quot;:8,&quot;term&quot;:144,&quot;trait&quot;:0,&quot;legacy&quot;:2,&quot;orderTable&quot;:203,&quot;orderDeck&quot;:316}," calcext:value-type="string">
            <text:p>{"id":"2-71","name":"シャトルーズ","imageUrl":"https://one-draw.jp/ijinden/cardlist/002/card/02_071.png","expansion":25,"type":3,"level":3,"color":8,"term":144,"trait":0,"legacy":2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0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JSON.$A$1];[.$C205];[$JSON.$B$1];[.$E205];[$JSON.$C$1];[.$T205];[$JSON.$D$1];[.$G205];[$JSON.$E$1];[.$I205];[$JSON.$F$1];[.$L205];[$JSON.$G$1];[.$K205];[$JSON.$H$1];[.$O205];[$JSON.$I$1];[.$Q205];[$JSON.$J$1];[.$S205];[$JSON.$K$1];[.$A205];[$JSON.$L$1];[.$B205];[$JSON.$M$1])" office:value-type="string" office:string-value="{&quot;id&quot;:&quot;2-72&quot;,&quot;name&quot;:&quot;サンドグラス&quot;,&quot;imageUrl&quot;:&quot;https://one-draw.jp/ijinden/cardlist/002/card/02_072.png&quot;,&quot;expansion&quot;:25,&quot;type&quot;:4,&quot;level&quot;:1,&quot;color&quot;:8,&quot;term&quot;:0,&quot;trait&quot;:0,&quot;legacy&quot;:0,&quot;orderTable&quot;:204,&quot;orderDeck&quot;:362}," calcext:value-type="string">
            <text:p>{"id":"2-72","name":"サンドグラス","imageUrl":"https://one-draw.jp/ijinden/cardlist/002/card/02_072.png","expansion":25,"type":4,"level":1,"color":8,"term":0,"trait":0,"legacy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6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JSON.$A$1];[.$C206];[$JSON.$B$1];[.$E206];[$JSON.$C$1];[.$T206];[$JSON.$D$1];[.$G206];[$JSON.$E$1];[.$I206];[$JSON.$F$1];[.$L206];[$JSON.$G$1];[.$K206];[$JSON.$H$1];[.$O206];[$JSON.$I$1];[.$Q206];[$JSON.$J$1];[.$S206];[$JSON.$K$1];[.$A206];[$JSON.$L$1];[.$B206];[$JSON.$M$1])" office:value-type="string" office:string-value="{&quot;id&quot;:&quot;2-73&quot;,&quot;name&quot;:&quot;シルククローク&quot;,&quot;imageUrl&quot;:&quot;https://one-draw.jp/ijinden/cardlist/002/card/02_073.png&quot;,&quot;expansion&quot;:25,&quot;type&quot;:4,&quot;level&quot;:1,&quot;color&quot;:8,&quot;term&quot;:0,&quot;trait&quot;:0,&quot;legacy&quot;:3,&quot;orderTable&quot;:205,&quot;orderDeck&quot;:363}," calcext:value-type="string">
            <text:p>{"id":"2-73","name":"シルククローク","imageUrl":"https://one-draw.jp/ijinden/cardlist/002/card/02_073.png","expansion":25,"type":4,"level":1,"color":8,"term":0,"trait":0,"legacy":3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JSON.$A$1];[.$C207];[$JSON.$B$1];[.$E207];[$JSON.$C$1];[.$T207];[$JSON.$D$1];[.$G207];[$JSON.$E$1];[.$I207];[$JSON.$F$1];[.$L207];[$JSON.$G$1];[.$K207];[$JSON.$H$1];[.$O207];[$JSON.$I$1];[.$Q207];[$JSON.$J$1];[.$S207];[$JSON.$K$1];[.$A207];[$JSON.$L$1];[.$B207];[$JSON.$M$1])" office:value-type="string" office:string-value="{&quot;id&quot;:&quot;2-74&quot;,&quot;name&quot;:&quot;イエローオーブ&quot;,&quot;imageUrl&quot;:&quot;https://one-draw.jp/ijinden/cardlist/002/card/02_074.png&quot;,&quot;expansion&quot;:25,&quot;type&quot;:4,&quot;level&quot;:2,&quot;color&quot;:8,&quot;term&quot;:0,&quot;trait&quot;:0,&quot;legacy&quot;:3,&quot;orderTable&quot;:206,&quot;orderDeck&quot;:382}," calcext:value-type="string">
            <text:p>{"id":"2-74","name":"イエローオーブ","imageUrl":"https://one-draw.jp/ijinden/cardlist/002/card/02_074.png","expansion":25,"type":4,"level":2,"color":8,"term":0,"trait":0,"legacy":3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JSON.$A$1];[.$C208];[$JSON.$B$1];[.$E208];[$JSON.$C$1];[.$T208];[$JSON.$D$1];[.$G208];[$JSON.$E$1];[.$I208];[$JSON.$F$1];[.$L208];[$JSON.$G$1];[.$K208];[$JSON.$H$1];[.$O208];[$JSON.$I$1];[.$Q208];[$JSON.$J$1];[.$S208];[$JSON.$K$1];[.$A208];[$JSON.$L$1];[.$B208];[$JSON.$M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level&quot;:1,&quot;color&quot;:41,&quot;term&quot;:0,&quot;trait&quot;:0,&quot;legacy&quot;:3,&quot;orderTable&quot;:207,&quot;orderDeck&quot;:372}," calcext:value-type="string">
            <text:p>{"id":"2-75","name":"RYマーブルストーン","imageUrl":"https://one-draw.jp/ijinden/cardlist/002/card/02_075.png","expansion":25,"type":4,"level":1,"color":41,"term":0,"trait":0,"legacy":3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0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JSON.$A$1];[.$C209];[$JSON.$B$1];[.$E209];[$JSON.$C$1];[.$T209];[$JSON.$D$1];[.$G209];[$JSON.$E$1];[.$I209];[$JSON.$F$1];[.$L209];[$JSON.$G$1];[.$K209];[$JSON.$H$1];[.$O209];[$JSON.$I$1];[.$Q209];[$JSON.$J$1];[.$S209];[$JSON.$K$1];[.$A209];[$JSON.$L$1];[.$B209];[$JSON.$M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level&quot;:1,&quot;color&quot;:42,&quot;term&quot;:0,&quot;trait&quot;:0,&quot;legacy&quot;:3,&quot;orderTable&quot;:208,&quot;orderDeck&quot;:373}," calcext:value-type="string">
            <text:p>{"id":"2-76","name":"BYマーブルストーン","imageUrl":"https://one-draw.jp/ijinden/cardlist/002/card/02_076.png","expansion":25,"type":4,"level":1,"color":42,"term":0,"trait":0,"legacy":3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0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JSON.$A$1];[.$C210];[$JSON.$B$1];[.$E210];[$JSON.$C$1];[.$T210];[$JSON.$D$1];[.$G210];[$JSON.$E$1];[.$I210];[$JSON.$F$1];[.$L210];[$JSON.$G$1];[.$K210];[$JSON.$H$1];[.$O210];[$JSON.$I$1];[.$Q210];[$JSON.$J$1];[.$S210];[$JSON.$K$1];[.$A210];[$JSON.$L$1];[.$B210];[$JSON.$M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level&quot;:1,&quot;color&quot;:44,&quot;term&quot;:0,&quot;trait&quot;:0,&quot;legacy&quot;:3,&quot;orderTable&quot;:209,&quot;orderDeck&quot;:374}," calcext:value-type="string">
            <text:p>{"id":"2-77","name":"GYマーブルストーン","imageUrl":"https://one-draw.jp/ijinden/cardlist/002/card/02_077.png","expansion":25,"type":4,"level":1,"color":44,"term":0,"trait":0,"legacy":3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JSON.$A$1];[.$C211];[$JSON.$B$1];[.$E211];[$JSON.$C$1];[.$T211];[$JSON.$D$1];[.$G211];[$JSON.$E$1];[.$I211];[$JSON.$F$1];[.$L211];[$JSON.$G$1];[.$K211];[$JSON.$H$1];[.$O211];[$JSON.$I$1];[.$Q211];[$JSON.$J$1];[.$S211];[$JSON.$K$1];[.$A211];[$JSON.$L$1];[.$B211];[$JSON.$M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level&quot;:2,&quot;color&quot;:41,&quot;term&quot;:0,&quot;trait&quot;:0,&quot;legacy&quot;:3,&quot;orderTable&quot;:210,&quot;orderDeck&quot;:384}," calcext:value-type="string">
            <text:p>{"id":"2-78","name":"RYマーブルオーブ","imageUrl":"https://one-draw.jp/ijinden/cardlist/002/card/02_078.png","expansion":25,"type":4,"level":2,"color":41,"term":0,"trait":0,"legacy":3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2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JSON.$A$1];[.$C212];[$JSON.$B$1];[.$E212];[$JSON.$C$1];[.$T212];[$JSON.$D$1];[.$G212];[$JSON.$E$1];[.$I212];[$JSON.$F$1];[.$L212];[$JSON.$G$1];[.$K212];[$JSON.$H$1];[.$O212];[$JSON.$I$1];[.$Q212];[$JSON.$J$1];[.$S212];[$JSON.$K$1];[.$A212];[$JSON.$L$1];[.$B212];[$JSON.$M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level&quot;:2,&quot;color&quot;:42,&quot;term&quot;:0,&quot;trait&quot;:0,&quot;legacy&quot;:3,&quot;orderTable&quot;:211,&quot;orderDeck&quot;:385}," calcext:value-type="string">
            <text:p>{"id":"2-79","name":"BYマーブルオーブ","imageUrl":"https://one-draw.jp/ijinden/cardlist/002/card/02_079.png","expansion":25,"type":4,"level":2,"color":42,"term":0,"trait":0,"legacy":3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1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JSON.$A$1];[.$C213];[$JSON.$B$1];[.$E213];[$JSON.$C$1];[.$T213];[$JSON.$D$1];[.$G213];[$JSON.$E$1];[.$I213];[$JSON.$F$1];[.$L213];[$JSON.$G$1];[.$K213];[$JSON.$H$1];[.$O213];[$JSON.$I$1];[.$Q213];[$JSON.$J$1];[.$S213];[$JSON.$K$1];[.$A213];[$JSON.$L$1];[.$B213];[$JSON.$M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level&quot;:2,&quot;color&quot;:44,&quot;term&quot;:0,&quot;trait&quot;:0,&quot;legacy&quot;:3,&quot;orderTable&quot;:212,&quot;orderDeck&quot;:386}," calcext:value-type="string">
            <text:p>{"id":"2-80","name":"GYマーブルオーブ","imageUrl":"https://one-draw.jp/ijinden/cardlist/002/card/02_080.png","expansion":25,"type":4,"level":2,"color":44,"term":0,"trait":0,"legacy":3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木霊</text:p>
          </table:table-cell>
          <table:table-cell table:formula="of:=IFERROR(VLOOKUP([.$R214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JSON.$A$1];[.$C214];[$JSON.$B$1];[.$E214];[$JSON.$C$1];[.$T214];[$JSON.$D$1];[.$G214];[$JSON.$E$1];[.$I214];[$JSON.$F$1];[.$L214];[$JSON.$G$1];[.$K214];[$JSON.$H$1];[.$O214];[$JSON.$I$1];[.$Q214];[$JSON.$J$1];[.$S214];[$JSON.$K$1];[.$A214];[$JSON.$L$1];[.$B214];[$JSON.$M$1])" office:value-type="string" office:string-value="{&quot;id&quot;:&quot;P-1&quot;,&quot;name&quot;:&quot;マリ・キュリー&quot;,&quot;imageUrl&quot;:&quot;https://one-draw.jp/ijinden/cardlist/P01/card/03_P_001.png&quot;,&quot;expansion&quot;:30,&quot;type&quot;:1,&quot;level&quot;:4,&quot;color&quot;:16,&quot;term&quot;:0,&quot;trait&quot;:0,&quot;legacy&quot;:8,&quot;orderTable&quot;:213,&quot;orderDeck&quot;:139}," calcext:value-type="string">
            <text:p>{"id":"P-1","name":"マリ・キュリー","imageUrl":"https://one-draw.jp/ijinden/cardlist/P01/card/03_P_001.png","expansion":30,"type":1,"level":4,"color":16,"term":0,"trait":0,"legacy":8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魔力化</text:p>
          </table:table-cell>
          <table:table-cell table:formula="of:=IFERROR(VLOOKUP([.$R21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JSON.$A$1];[.$C215];[$JSON.$B$1];[.$E215];[$JSON.$C$1];[.$T215];[$JSON.$D$1];[.$G215];[$JSON.$E$1];[.$I215];[$JSON.$F$1];[.$L215];[$JSON.$G$1];[.$K215];[$JSON.$H$1];[.$O215];[$JSON.$I$1];[.$Q215];[$JSON.$J$1];[.$S215];[$JSON.$K$1];[.$A215];[$JSON.$L$1];[.$B215];[$JSON.$M$1])" office:value-type="string" office:string-value="{&quot;id&quot;:&quot;P-2&quot;,&quot;name&quot;:&quot;篤姫&quot;,&quot;imageUrl&quot;:&quot;https://one-draw.jp/ijinden/cardlist/P01/card/03_P_002.png&quot;,&quot;expansion&quot;:30,&quot;type&quot;:1,&quot;level&quot;:1,&quot;color&quot;:16,&quot;term&quot;:0,&quot;trait&quot;:0,&quot;legacy&quot;:1,&quot;orderTable&quot;:214,&quot;orderDeck&quot;:20}," calcext:value-type="string">
            <text:p>{"id":"P-2","name":"篤姫","imageUrl":"https://one-draw.jp/ijinden/cardlist/P01/card/03_P_002.png","expansion":30,"type":1,"level":1,"color":16,"term":0,"trait":0,"legacy":1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1ドローする</text:p>
          </table:table-cell>
          <table:table-cell table:formula="of:=IFERROR(VLOOKUP([.$R21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JSON.$A$1];[.$C216];[$JSON.$B$1];[.$E216];[$JSON.$C$1];[.$T216];[$JSON.$D$1];[.$G216];[$JSON.$E$1];[.$I216];[$JSON.$F$1];[.$L216];[$JSON.$G$1];[.$K216];[$JSON.$H$1];[.$O216];[$JSON.$I$1];[.$Q216];[$JSON.$J$1];[.$S216];[$JSON.$K$1];[.$A216];[$JSON.$L$1];[.$B216];[$JSON.$M$1])" office:value-type="string" office:string-value="{&quot;id&quot;:&quot;P-3&quot;,&quot;name&quot;:&quot;李成桂&quot;,&quot;imageUrl&quot;:&quot;https://one-draw.jp/ijinden/cardlist/P01/card/03_P_003.png&quot;,&quot;expansion&quot;:30,&quot;type&quot;:1,&quot;level&quot;:2,&quot;color&quot;:16,&quot;term&quot;:0,&quot;trait&quot;:0,&quot;legacy&quot;:4,&quot;orderTable&quot;:215,&quot;orderDeck&quot;:58}," calcext:value-type="string">
            <text:p>{"id":"P-3","name":"李成桂","imageUrl":"https://one-draw.jp/ijinden/cardlist/P01/card/03_P_003.png","expansion":30,"type":1,"level":2,"color":16,"term":0,"trait":0,"legacy":4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7];[$特性番号.$A$1:$特性番号.$B$8];2;0);0)" office:value-type="float" office:value="16" calcext:value-type="float">
            <text:p>1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1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JSON.$A$1];[.$C217];[$JSON.$B$1];[.$E217];[$JSON.$C$1];[.$T217];[$JSON.$D$1];[.$G217];[$JSON.$E$1];[.$I217];[$JSON.$F$1];[.$L217];[$JSON.$G$1];[.$K217];[$JSON.$H$1];[.$O217];[$JSON.$I$1];[.$Q217];[$JSON.$J$1];[.$S217];[$JSON.$K$1];[.$A217];[$JSON.$L$1];[.$B217];[$JSON.$M$1])" office:value-type="string" office:string-value="{&quot;id&quot;:&quot;P-4&quot;,&quot;name&quot;:&quot;杉田玄白&quot;,&quot;imageUrl&quot;:&quot;https://one-draw.jp/ijinden/cardlist/P01/card/03_P_004.png&quot;,&quot;expansion&quot;:30,&quot;type&quot;:1,&quot;level&quot;:4,&quot;color&quot;:16,&quot;term&quot;:0,&quot;trait&quot;:16,&quot;legacy&quot;:0,&quot;orderTable&quot;:216,&quot;orderDeck&quot;:140}," calcext:value-type="string">
            <text:p>{"id":"P-4","name":"杉田玄白","imageUrl":"https://one-draw.jp/ijinden/cardlist/P01/card/03_P_004.png","expansion":30,"type":1,"level":4,"color":16,"term":0,"trait":16,"legacy":0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18];[$特性番号.$A$1:$特性番号.$B$8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JSON.$A$1];[.$C218];[$JSON.$B$1];[.$E218];[$JSON.$C$1];[.$T218];[$JSON.$D$1];[.$G218];[$JSON.$E$1];[.$I218];[$JSON.$F$1];[.$L218];[$JSON.$G$1];[.$K218];[$JSON.$H$1];[.$O218];[$JSON.$I$1];[.$Q218];[$JSON.$J$1];[.$S218];[$JSON.$K$1];[.$A218];[$JSON.$L$1];[.$B218];[$JSON.$M$1])" office:value-type="string" office:string-value="{&quot;id&quot;:&quot;P-5&quot;,&quot;name&quot;:&quot;渡辺崋山&quot;,&quot;imageUrl&quot;:&quot;https://one-draw.jp/ijinden/cardlist/P01/card/03_P_005.png&quot;,&quot;expansion&quot;:30,&quot;type&quot;:1,&quot;level&quot;:2,&quot;color&quot;:16,&quot;term&quot;:0,&quot;trait&quot;:2,&quot;legacy&quot;:0,&quot;orderTable&quot;:217,&quot;orderDeck&quot;:59}," calcext:value-type="string">
            <text:p>{"id":"P-5","name":"渡辺崋山","imageUrl":"https://one-draw.jp/ijinden/cardlist/P01/card/03_P_005.png","expansion":30,"type":1,"level":2,"color":16,"term":0,"trait":2,"legacy":0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9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木霊</text:p>
          </table:table-cell>
          <table:table-cell table:formula="of:=IFERROR(VLOOKUP([.$R219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JSON.$A$1];[.$C219];[$JSON.$B$1];[.$E219];[$JSON.$C$1];[.$T219];[$JSON.$D$1];[.$G219];[$JSON.$E$1];[.$I219];[$JSON.$F$1];[.$L219];[$JSON.$G$1];[.$K219];[$JSON.$H$1];[.$O219];[$JSON.$I$1];[.$Q219];[$JSON.$J$1];[.$S219];[$JSON.$K$1];[.$A219];[$JSON.$L$1];[.$B219];[$JSON.$M$1])" office:value-type="string" office:string-value="{&quot;id&quot;:&quot;P-6&quot;,&quot;name&quot;:&quot;緒方洪庵&quot;,&quot;imageUrl&quot;:&quot;https://one-draw.jp/ijinden/cardlist/P01/card/03_P_006.png&quot;,&quot;expansion&quot;:30,&quot;type&quot;:1,&quot;level&quot;:3,&quot;color&quot;:16,&quot;term&quot;:0,&quot;trait&quot;:16,&quot;legacy&quot;:8,&quot;orderTable&quot;:218,&quot;orderDeck&quot;:101}," calcext:value-type="string">
            <text:p>{"id":"P-6","name":"緒方洪庵","imageUrl":"https://one-draw.jp/ijinden/cardlist/P01/card/03_P_006.png","expansion":30,"type":1,"level":3,"color":16,"term":0,"trait":16,"legacy":8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20];[$特性番号.$A$1:$特性番号.$B$8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JSON.$A$1];[.$C220];[$JSON.$B$1];[.$E220];[$JSON.$C$1];[.$T220];[$JSON.$D$1];[.$G220];[$JSON.$E$1];[.$I220];[$JSON.$F$1];[.$L220];[$JSON.$G$1];[.$K220];[$JSON.$H$1];[.$O220];[$JSON.$I$1];[.$Q220];[$JSON.$J$1];[.$S220];[$JSON.$K$1];[.$A220];[$JSON.$L$1];[.$B220];[$JSON.$M$1])" office:value-type="string" office:string-value="{&quot;id&quot;:&quot;P-7&quot;,&quot;name&quot;:&quot;岡田以蔵&quot;,&quot;imageUrl&quot;:&quot;https://one-draw.jp/ijinden/cardlist/P01/card/03_P_007.png&quot;,&quot;expansion&quot;:30,&quot;type&quot;:1,&quot;level&quot;:5,&quot;color&quot;:16,&quot;term&quot;:0,&quot;trait&quot;:1,&quot;legacy&quot;:0,&quot;orderTable&quot;:219,&quot;orderDeck&quot;:177}," calcext:value-type="string">
            <text:p>{"id":"P-7","name":"岡田以蔵","imageUrl":"https://one-draw.jp/ijinden/cardlist/P01/card/03_P_007.png","expansion":30,"type":1,"level":5,"color":16,"term":0,"trait":1,"legacy":0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21];[$特性番号.$A$1:$特性番号.$B$8];2;0);0)" office:value-type="float" office:value="16" calcext:value-type="float">
            <text:p>1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JSON.$A$1];[.$C221];[$JSON.$B$1];[.$E221];[$JSON.$C$1];[.$T221];[$JSON.$D$1];[.$G221];[$JSON.$E$1];[.$I221];[$JSON.$F$1];[.$L221];[$JSON.$G$1];[.$K221];[$JSON.$H$1];[.$O221];[$JSON.$I$1];[.$Q221];[$JSON.$J$1];[.$S221];[$JSON.$K$1];[.$A221];[$JSON.$L$1];[.$B221];[$JSON.$M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level&quot;:3,&quot;color&quot;:16,&quot;term&quot;:0,&quot;trait&quot;:16,&quot;legacy&quot;:0,&quot;orderTable&quot;:220,&quot;orderDeck&quot;:102}," calcext:value-type="string">
            <text:p>{"id":"P-8","name":"クララ・バートン","imageUrl":"https://one-draw.jp/ijinden/cardlist/P01/card/03_P_008.png","expansion":30,"type":1,"level":3,"color":16,"term":0,"trait":16,"legacy":0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手札に戻す</text:p>
          </table:table-cell>
          <table:table-cell table:formula="of:=IFERROR(VLOOKUP([.$R22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JSON.$A$1];[.$C222];[$JSON.$B$1];[.$E222];[$JSON.$C$1];[.$T222];[$JSON.$D$1];[.$G222];[$JSON.$E$1];[.$I222];[$JSON.$F$1];[.$L222];[$JSON.$G$1];[.$K222];[$JSON.$H$1];[.$O222];[$JSON.$I$1];[.$Q222];[$JSON.$J$1];[.$S222];[$JSON.$K$1];[.$A222];[$JSON.$L$1];[.$B222];[$JSON.$M$1])" office:value-type="string" office:string-value="{&quot;id&quot;:&quot;P-9&quot;,&quot;name&quot;:&quot;虎狼痢&quot;,&quot;imageUrl&quot;:&quot;https://one-draw.jp/ijinden/cardlist/P01/card/03_P_009.png&quot;,&quot;expansion&quot;:30,&quot;type&quot;:2,&quot;level&quot;:6,&quot;color&quot;:16,&quot;term&quot;:0,&quot;trait&quot;:0,&quot;legacy&quot;:5,&quot;orderTable&quot;:221,&quot;orderDeck&quot;:277}," calcext:value-type="string">
            <text:p>{"id":"P-9","name":"虎狼痢","imageUrl":"https://one-draw.jp/ijinden/cardlist/P01/card/03_P_009.png","expansion":30,"type":2,"level":6,"color":16,"term":0,"trait":0,"legacy":5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3];[$特性番号.$A$1:$特性番号.$B$8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JSON.$A$1];[.$C223];[$JSON.$B$1];[.$E223];[$JSON.$C$1];[.$T223];[$JSON.$D$1];[.$G223];[$JSON.$E$1];[.$I223];[$JSON.$F$1];[.$L223];[$JSON.$G$1];[.$K223];[$JSON.$H$1];[.$O223];[$JSON.$I$1];[.$Q223];[$JSON.$J$1];[.$S223];[$JSON.$K$1];[.$A223];[$JSON.$L$1];[.$B223];[$JSON.$M$1])" office:value-type="string" office:string-value="{&quot;id&quot;:&quot;P-10&quot;,&quot;name&quot;:&quot;浪士集う長屋&quot;,&quot;imageUrl&quot;:&quot;https://one-draw.jp/ijinden/cardlist/P01/card/03_P_010.png&quot;,&quot;expansion&quot;:30,&quot;type&quot;:2,&quot;level&quot;:5,&quot;color&quot;:16,&quot;term&quot;:0,&quot;trait&quot;:0,&quot;legacy&quot;:0,&quot;orderTable&quot;:222,&quot;orderDeck&quot;:271}," calcext:value-type="string">
            <text:p>{"id":"P-10","name":"浪士集う長屋","imageUrl":"https://one-draw.jp/ijinden/cardlist/P01/card/03_P_010.png","expansion":30,"type":2,"level":5,"color":16,"term":0,"trait":0,"legacy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魔力化</text:p>
          </table:table-cell>
          <table:table-cell table:formula="of:=IFERROR(VLOOKUP([.$R22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JSON.$A$1];[.$C224];[$JSON.$B$1];[.$E224];[$JSON.$C$1];[.$T224];[$JSON.$D$1];[.$G224];[$JSON.$E$1];[.$I224];[$JSON.$F$1];[.$L224];[$JSON.$G$1];[.$K224];[$JSON.$H$1];[.$O224];[$JSON.$I$1];[.$Q224];[$JSON.$J$1];[.$S224];[$JSON.$K$1];[.$A224];[$JSON.$L$1];[.$B224];[$JSON.$M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level&quot;:1,&quot;color&quot;:16,&quot;term&quot;:0,&quot;trait&quot;:0,&quot;legacy&quot;:1,&quot;orderTable&quot;:223,&quot;orderDeck&quot;:286}," calcext:value-type="string">
            <text:p>{"id":"P-11","name":"スピリットアウェイ","imageUrl":"https://one-draw.jp/ijinden/cardlist/P01/card/03_P_011.png","expansion":30,"type":3,"level":1,"color":16,"term":0,"trait":0,"legacy":1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冥府発動</text:p>
          </table:table-cell>
          <table:table-cell table:formula="of:=IFERROR(VLOOKUP([.$R225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JSON.$A$1];[.$C225];[$JSON.$B$1];[.$E225];[$JSON.$C$1];[.$T225];[$JSON.$D$1];[.$G225];[$JSON.$E$1];[.$I225];[$JSON.$F$1];[.$L225];[$JSON.$G$1];[.$K225];[$JSON.$H$1];[.$O225];[$JSON.$I$1];[.$Q225];[$JSON.$J$1];[.$S225];[$JSON.$K$1];[.$A225];[$JSON.$L$1];[.$B225];[$JSON.$M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level&quot;:4,&quot;color&quot;:16,&quot;term&quot;:0,&quot;trait&quot;:0,&quot;legacy&quot;:2,&quot;orderTable&quot;:224,&quot;orderDeck&quot;:324}," calcext:value-type="string">
            <text:p>{"id":"P-12","name":"タイムディレイション","imageUrl":"https://one-draw.jp/ijinden/cardlist/P01/card/03_P_012.png","expansion":30,"type":3,"level":4,"color":16,"term":0,"trait":0,"legacy":2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6];[$特性番号.$A$1:$特性番号.$B$8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R22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JSON.$A$1];[.$C226];[$JSON.$B$1];[.$E226];[$JSON.$C$1];[.$T226];[$JSON.$D$1];[.$G226];[$JSON.$E$1];[.$I226];[$JSON.$F$1];[.$L226];[$JSON.$G$1];[.$K226];[$JSON.$H$1];[.$O226];[$JSON.$I$1];[.$Q226];[$JSON.$J$1];[.$S226];[$JSON.$K$1];[.$A226];[$JSON.$L$1];[.$B226];[$JSON.$M$1])" office:value-type="string" office:string-value="{&quot;id&quot;:&quot;P-13&quot;,&quot;name&quot;:&quot;ハンドミラー&quot;,&quot;imageUrl&quot;:&quot;https://one-draw.jp/ijinden/cardlist/P01/card/03_P_013.png&quot;,&quot;expansion&quot;:30,&quot;type&quot;:4,&quot;level&quot;:1,&quot;color&quot;:16,&quot;term&quot;:0,&quot;trait&quot;:0,&quot;legacy&quot;:0,&quot;orderTable&quot;:225,&quot;orderDeck&quot;:366}," calcext:value-type="string">
            <text:p>{"id":"P-13","name":"ハンドミラー","imageUrl":"https://one-draw.jp/ijinden/cardlist/P01/card/03_P_013.png","expansion":30,"type":4,"level":1,"color":16,"term":0,"trait":0,"legacy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JSON.$A$1];[.$C227];[$JSON.$B$1];[.$E227];[$JSON.$C$1];[.$T227];[$JSON.$D$1];[.$G227];[$JSON.$E$1];[.$I227];[$JSON.$F$1];[.$L227];[$JSON.$G$1];[.$K227];[$JSON.$H$1];[.$O227];[$JSON.$I$1];[.$Q227];[$JSON.$J$1];[.$S227];[$JSON.$K$1];[.$A227];[$JSON.$L$1];[.$B227];[$JSON.$M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level&quot;:1,&quot;color&quot;:16,&quot;term&quot;:0,&quot;trait&quot;:0,&quot;legacy&quot;:3,&quot;orderTable&quot;:226,&quot;orderDeck&quot;:367}," calcext:value-type="string">
            <text:p>{"id":"P-14","name":"ブラックブレイド","imageUrl":"https://one-draw.jp/ijinden/cardlist/P01/card/03_P_014.png","expansion":30,"type":4,"level":1,"color":16,"term":0,"trait":0,"legacy":3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JSON.$A$1];[.$C228];[$JSON.$B$1];[.$E228];[$JSON.$C$1];[.$T228];[$JSON.$D$1];[.$G228];[$JSON.$E$1];[.$I228];[$JSON.$F$1];[.$L228];[$JSON.$G$1];[.$K228];[$JSON.$H$1];[.$O228];[$JSON.$I$1];[.$Q228];[$JSON.$J$1];[.$S228];[$JSON.$K$1];[.$A228];[$JSON.$L$1];[.$B228];[$JSON.$M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level&quot;:2,&quot;color&quot;:16,&quot;term&quot;:0,&quot;trait&quot;:0,&quot;legacy&quot;:3,&quot;orderTable&quot;:227,&quot;orderDeck&quot;:383}," calcext:value-type="string">
            <text:p>{"id":"P-15","name":"パープルオーブ","imageUrl":"https://one-draw.jp/ijinden/cardlist/P01/card/03_P_015.png","expansion":30,"type":4,"level":2,"color":16,"term":0,"trait":0,"legacy":3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229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JSON.$A$1];[.$C229];[$JSON.$B$1];[.$E229];[$JSON.$C$1];[.$T229];[$JSON.$D$1];[.$G229];[$JSON.$E$1];[.$I229];[$JSON.$F$1];[.$L229];[$JSON.$G$1];[.$K229];[$JSON.$H$1];[.$O229];[$JSON.$I$1];[.$Q229];[$JSON.$J$1];[.$S229];[$JSON.$K$1];[.$A229];[$JSON.$L$1];[.$B229];[$JSON.$M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level&quot;:1,&quot;color&quot;:16,&quot;term&quot;:0,&quot;trait&quot;:0,&quot;legacy&quot;:3,&quot;orderTable&quot;:228,&quot;orderDeck&quot;:368}," calcext:value-type="string">
            <text:p>{"id":"P-16","name":"パープルストーン","imageUrl":"https://one-draw.jp/ijinden/cardlist/P01/card/03_P_016.png","expansion":30,"type":4,"level":1,"color":16,"term":0,"trait":0,"legacy":3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30];[$特性番号.$A$1:$特性番号.$B$8];2;0);0)" office:value-type="float" office:value="1" calcext:value-type="float">
            <text:p>1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3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JSON.$A$1];[.$C230];[$JSON.$B$1];[.$E230];[$JSON.$C$1];[.$T230];[$JSON.$D$1];[.$G230];[$JSON.$E$1];[.$I230];[$JSON.$F$1];[.$L230];[$JSON.$G$1];[.$K230];[$JSON.$H$1];[.$O230];[$JSON.$I$1];[.$Q230];[$JSON.$J$1];[.$S230];[$JSON.$K$1];[.$A230];[$JSON.$L$1];[.$B230];[$JSON.$M$1])" office:value-type="string" office:string-value="{&quot;id&quot;:&quot;3-1&quot;,&quot;name&quot;:&quot;宮本武蔵&quot;,&quot;imageUrl&quot;:&quot;https://one-draw.jp/ijinden/cardlist/003/card/03_001.png&quot;,&quot;expansion&quot;:35,&quot;type&quot;:1,&quot;level&quot;:5,&quot;color&quot;:1,&quot;term&quot;:0,&quot;trait&quot;:1,&quot;legacy&quot;:0,&quot;orderTable&quot;:229,&quot;orderDeck&quot;:150}," calcext:value-type="string">
            <text:p>{"id":"3-1","name":"宮本武蔵","imageUrl":"https://one-draw.jp/ijinden/cardlist/003/card/03_001.png","expansion":35,"type":1,"level":5,"color":1,"term":0,"trait":1,"legacy":0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31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JSON.$A$1];[.$C231];[$JSON.$B$1];[.$E231];[$JSON.$C$1];[.$T231];[$JSON.$D$1];[.$G231];[$JSON.$E$1];[.$I231];[$JSON.$F$1];[.$L231];[$JSON.$G$1];[.$K231];[$JSON.$H$1];[.$O231];[$JSON.$I$1];[.$Q231];[$JSON.$J$1];[.$S231];[$JSON.$K$1];[.$A231];[$JSON.$L$1];[.$B231];[$JSON.$M$1])" office:value-type="string" office:string-value="{&quot;id&quot;:&quot;3-2&quot;,&quot;name&quot;:&quot;エリザベス1世&quot;,&quot;imageUrl&quot;:&quot;https://one-draw.jp/ijinden/cardlist/003/card/03_002.png&quot;,&quot;expansion&quot;:35,&quot;type&quot;:1,&quot;level&quot;:4,&quot;color&quot;:1,&quot;term&quot;:0,&quot;trait&quot;:0,&quot;legacy&quot;:6,&quot;orderTable&quot;:230,&quot;orderDeck&quot;:111}," calcext:value-type="string">
            <text:p>{"id":"3-2","name":"エリザベス1世","imageUrl":"https://one-draw.jp/ijinden/cardlist/003/card/03_002.png","expansion":35,"type":1,"level":4,"color":1,"term":0,"trait":0,"legacy":6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JSON.$A$1];[.$C232];[$JSON.$B$1];[.$E232];[$JSON.$C$1];[.$T232];[$JSON.$D$1];[.$G232];[$JSON.$E$1];[.$I232];[$JSON.$F$1];[.$L232];[$JSON.$G$1];[.$K232];[$JSON.$H$1];[.$O232];[$JSON.$I$1];[.$Q232];[$JSON.$J$1];[.$S232];[$JSON.$K$1];[.$A232];[$JSON.$L$1];[.$B232];[$JSON.$M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level&quot;:7,&quot;color&quot;:2,&quot;term&quot;:0,&quot;trait&quot;:0,&quot;legacy&quot;:4,&quot;orderTable&quot;:231,&quot;orderDeck&quot;:206}," calcext:value-type="string">
            <text:p>{"id":"3-3","name":"エンリケ航海王子","imageUrl":"https://one-draw.jp/ijinden/cardlist/003/card/03_003.png","expansion":35,"type":1,"level":7,"color":2,"term":0,"trait":0,"legacy":4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33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JSON.$A$1];[.$C233];[$JSON.$B$1];[.$E233];[$JSON.$C$1];[.$T233];[$JSON.$D$1];[.$G233];[$JSON.$E$1];[.$I233];[$JSON.$F$1];[.$L233];[$JSON.$G$1];[.$K233];[$JSON.$H$1];[.$O233];[$JSON.$I$1];[.$Q233];[$JSON.$J$1];[.$S233];[$JSON.$K$1];[.$A233];[$JSON.$L$1];[.$B233];[$JSON.$M$1])" office:value-type="string" office:string-value="{&quot;id&quot;:&quot;3-4&quot;,&quot;name&quot;:&quot;吉田松陰&quot;,&quot;imageUrl&quot;:&quot;https://one-draw.jp/ijinden/cardlist/003/card/03_004.png&quot;,&quot;expansion&quot;:35,&quot;type&quot;:1,&quot;level&quot;:5,&quot;color&quot;:2,&quot;term&quot;:0,&quot;trait&quot;:8,&quot;legacy&quot;:4,&quot;orderTable&quot;:232,&quot;orderDeck&quot;:160}," calcext:value-type="string">
            <text:p>{"id":"3-4","name":"吉田松陰","imageUrl":"https://one-draw.jp/ijinden/cardlist/003/card/03_004.png","expansion":35,"type":1,"level":5,"color":2,"term":0,"trait":8,"legacy":4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34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JSON.$A$1];[.$C234];[$JSON.$B$1];[.$E234];[$JSON.$C$1];[.$T234];[$JSON.$D$1];[.$G234];[$JSON.$E$1];[.$I234];[$JSON.$F$1];[.$L234];[$JSON.$G$1];[.$K234];[$JSON.$H$1];[.$O234];[$JSON.$I$1];[.$Q234];[$JSON.$J$1];[.$S234];[$JSON.$K$1];[.$A234];[$JSON.$L$1];[.$B234];[$JSON.$M$1])" office:value-type="string" office:string-value="{&quot;id&quot;:&quot;3-5&quot;,&quot;name&quot;:&quot;徳川光圀&quot;,&quot;imageUrl&quot;:&quot;https://one-draw.jp/ijinden/cardlist/003/card/03_005.png&quot;,&quot;expansion&quot;:35,&quot;type&quot;:1,&quot;level&quot;:5,&quot;color&quot;:4,&quot;term&quot;:2,&quot;trait&quot;:0,&quot;legacy&quot;:8,&quot;orderTable&quot;:233,&quot;orderDeck&quot;:169}," calcext:value-type="string">
            <text:p>{"id":"3-5","name":"徳川光圀","imageUrl":"https://one-draw.jp/ijinden/cardlist/003/card/03_005.png","expansion":35,"type":1,"level":5,"color":4,"term":2,"trait":0,"legacy":8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5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3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JSON.$A$1];[.$C235];[$JSON.$B$1];[.$E235];[$JSON.$C$1];[.$T235];[$JSON.$D$1];[.$G235];[$JSON.$E$1];[.$I235];[$JSON.$F$1];[.$L235];[$JSON.$G$1];[.$K235];[$JSON.$H$1];[.$O235];[$JSON.$I$1];[.$Q235];[$JSON.$J$1];[.$S235];[$JSON.$K$1];[.$A235];[$JSON.$L$1];[.$B235];[$JSON.$M$1])" office:value-type="string" office:string-value="{&quot;id&quot;:&quot;3-6&quot;,&quot;name&quot;:&quot;葛飾応為&quot;,&quot;imageUrl&quot;:&quot;https://one-draw.jp/ijinden/cardlist/003/card/03_006.png&quot;,&quot;expansion&quot;:35,&quot;type&quot;:1,&quot;level&quot;:7,&quot;color&quot;:4,&quot;term&quot;:0,&quot;trait&quot;:2,&quot;legacy&quot;:1,&quot;orderTable&quot;:234,&quot;orderDeck&quot;:211}," calcext:value-type="string">
            <text:p>{"id":"3-6","name":"葛飾応為","imageUrl":"https://one-draw.jp/ijinden/cardlist/003/card/03_006.png","expansion":35,"type":1,"level":7,"color":4,"term":0,"trait":2,"legacy":1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3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JSON.$A$1];[.$C236];[$JSON.$B$1];[.$E236];[$JSON.$C$1];[.$T236];[$JSON.$D$1];[.$G236];[$JSON.$E$1];[.$I236];[$JSON.$F$1];[.$L236];[$JSON.$G$1];[.$K236];[$JSON.$H$1];[.$O236];[$JSON.$I$1];[.$Q236];[$JSON.$J$1];[.$S236];[$JSON.$K$1];[.$A236];[$JSON.$L$1];[.$B236];[$JSON.$M$1])" office:value-type="string" office:string-value="{&quot;id&quot;:&quot;3-7&quot;,&quot;name&quot;:&quot;曹丕&quot;,&quot;imageUrl&quot;:&quot;https://one-draw.jp/ijinden/cardlist/003/card/03_007.png&quot;,&quot;expansion&quot;:35,&quot;type&quot;:1,&quot;level&quot;:5,&quot;color&quot;:8,&quot;term&quot;:2,&quot;trait&quot;:0,&quot;legacy&quot;:0,&quot;orderTable&quot;:235,&quot;orderDeck&quot;:174}," calcext:value-type="string">
            <text:p>{"id":"3-7","name":"曹丕","imageUrl":"https://one-draw.jp/ijinden/cardlist/003/card/03_007.png","expansion":35,"type":1,"level":5,"color":8,"term":2,"trait":0,"legacy":0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3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JSON.$A$1];[.$C237];[$JSON.$B$1];[.$E237];[$JSON.$C$1];[.$T237];[$JSON.$D$1];[.$G237];[$JSON.$E$1];[.$I237];[$JSON.$F$1];[.$L237];[$JSON.$G$1];[.$K237];[$JSON.$H$1];[.$O237];[$JSON.$I$1];[.$Q237];[$JSON.$J$1];[.$S237];[$JSON.$K$1];[.$A237];[$JSON.$L$1];[.$B237];[$JSON.$M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level&quot;:8,&quot;color&quot;:8,&quot;term&quot;:2,&quot;trait&quot;:0,&quot;legacy&quot;:1,&quot;orderTable&quot;:236,&quot;orderDeck&quot;:226}," calcext:value-type="string">
            <text:p>{"id":"3-8","name":"ジェーン・オースティン","imageUrl":"https://one-draw.jp/ijinden/cardlist/003/card/03_008.png","expansion":35,"type":1,"level":8,"color":8,"term":2,"trait":0,"legacy":1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38];[$特性番号.$A$1:$特性番号.$B$8];2;0);0)" office:value-type="float" office:value="32" calcext:value-type="float">
            <text:p>32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38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JSON.$A$1];[.$C238];[$JSON.$B$1];[.$E238];[$JSON.$C$1];[.$T238];[$JSON.$D$1];[.$G238];[$JSON.$E$1];[.$I238];[$JSON.$F$1];[.$L238];[$JSON.$G$1];[.$K238];[$JSON.$H$1];[.$O238];[$JSON.$I$1];[.$Q238];[$JSON.$J$1];[.$S238];[$JSON.$K$1];[.$A238];[$JSON.$L$1];[.$B238];[$JSON.$M$1])" office:value-type="string" office:string-value="{&quot;id&quot;:&quot;3-9&quot;,&quot;name&quot;:&quot;土方歳三&quot;,&quot;imageUrl&quot;:&quot;https://one-draw.jp/ijinden/cardlist/003/card/03_009.png&quot;,&quot;expansion&quot;:35,&quot;type&quot;:1,&quot;level&quot;:6,&quot;color&quot;:16,&quot;term&quot;:0,&quot;trait&quot;:32,&quot;legacy&quot;:7,&quot;orderTable&quot;:237,&quot;orderDeck&quot;:200}," calcext:value-type="string">
            <text:p>{"id":"3-9","name":"土方歳三","imageUrl":"https://one-draw.jp/ijinden/cardlist/003/card/03_009.png","expansion":35,"type":1,"level":6,"color":16,"term":0,"trait":32,"legacy":7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3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JSON.$A$1];[.$C239];[$JSON.$B$1];[.$E239];[$JSON.$C$1];[.$T239];[$JSON.$D$1];[.$G239];[$JSON.$E$1];[.$I239];[$JSON.$F$1];[.$L239];[$JSON.$G$1];[.$K239];[$JSON.$H$1];[.$O239];[$JSON.$I$1];[.$Q239];[$JSON.$J$1];[.$S239];[$JSON.$K$1];[.$A239];[$JSON.$L$1];[.$B239];[$JSON.$M$1])" office:value-type="string" office:string-value="{&quot;id&quot;:&quot;3-10&quot;,&quot;name&quot;:&quot;武則天&quot;,&quot;imageUrl&quot;:&quot;https://one-draw.jp/ijinden/cardlist/003/card/03_010.png&quot;,&quot;expansion&quot;:35,&quot;type&quot;:1,&quot;level&quot;:2,&quot;color&quot;:16,&quot;term&quot;:0,&quot;trait&quot;:0,&quot;legacy&quot;:4,&quot;orderTable&quot;:238,&quot;orderDeck&quot;:60}," calcext:value-type="string">
            <text:p>{"id":"3-10","name":"武則天","imageUrl":"https://one-draw.jp/ijinden/cardlist/003/card/03_010.png","expansion":35,"type":1,"level":2,"color":16,"term":0,"trait":0,"legacy":4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JSON.$A$1];[.$C240];[$JSON.$B$1];[.$E240];[$JSON.$C$1];[.$T240];[$JSON.$D$1];[.$G240];[$JSON.$E$1];[.$I240];[$JSON.$F$1];[.$L240];[$JSON.$G$1];[.$K240];[$JSON.$H$1];[.$O240];[$JSON.$I$1];[.$Q240];[$JSON.$J$1];[.$S240];[$JSON.$K$1];[.$A240];[$JSON.$L$1];[.$B240];[$JSON.$M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level&quot;:4,&quot;color&quot;:1,&quot;term&quot;:0,&quot;trait&quot;:0,&quot;legacy&quot;:4,&quot;orderTable&quot;:239,&quot;orderDeck&quot;:112}," calcext:value-type="string">
            <text:p>{"id":"3-11","name":"ウィリアム・セシル","imageUrl":"https://one-draw.jp/ijinden/cardlist/003/card/03_011.png","expansion":35,"type":1,"level":4,"color":1,"term":0,"trait":0,"legacy":4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JSON.$A$1];[.$C241];[$JSON.$B$1];[.$E241];[$JSON.$C$1];[.$T241];[$JSON.$D$1];[.$G241];[$JSON.$E$1];[.$I241];[$JSON.$F$1];[.$L241];[$JSON.$G$1];[.$K241];[$JSON.$H$1];[.$O241];[$JSON.$I$1];[.$Q241];[$JSON.$J$1];[.$S241];[$JSON.$K$1];[.$A241];[$JSON.$L$1];[.$B241];[$JSON.$M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level&quot;:3,&quot;color&quot;:1,&quot;term&quot;:0,&quot;trait&quot;:0,&quot;legacy&quot;:4,&quot;orderTable&quot;:240,&quot;orderDeck&quot;:71}," calcext:value-type="string">
            <text:p>{"id":"3-12","name":"イーライ・ホイットニー","imageUrl":"https://one-draw.jp/ijinden/cardlist/003/card/03_012.png","expansion":35,"type":1,"level":3,"color":1,"term":0,"trait":0,"legacy":4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JSON.$A$1];[.$C242];[$JSON.$B$1];[.$E242];[$JSON.$C$1];[.$T242];[$JSON.$D$1];[.$G242];[$JSON.$E$1];[.$I242];[$JSON.$F$1];[.$L242];[$JSON.$G$1];[.$K242];[$JSON.$H$1];[.$O242];[$JSON.$I$1];[.$Q242];[$JSON.$J$1];[.$S242];[$JSON.$K$1];[.$A242];[$JSON.$L$1];[.$B242];[$JSON.$M$1])" office:value-type="string" office:string-value="{&quot;id&quot;:&quot;3-13&quot;,&quot;name&quot;:&quot;平賀源内&quot;,&quot;imageUrl&quot;:&quot;https://one-draw.jp/ijinden/cardlist/003/card/03_013.png&quot;,&quot;expansion&quot;:35,&quot;type&quot;:1,&quot;level&quot;:2,&quot;color&quot;:1,&quot;term&quot;:0,&quot;trait&quot;:0,&quot;legacy&quot;:4,&quot;orderTable&quot;:241,&quot;orderDeck&quot;:29}," calcext:value-type="string">
            <text:p>{"id":"3-13","name":"平賀源内","imageUrl":"https://one-draw.jp/ijinden/cardlist/003/card/03_013.png","expansion":35,"type":1,"level":2,"color":1,"term":0,"trait":0,"legacy":4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JSON.$A$1];[.$C243];[$JSON.$B$1];[.$E243];[$JSON.$C$1];[.$T243];[$JSON.$D$1];[.$G243];[$JSON.$E$1];[.$I243];[$JSON.$F$1];[.$L243];[$JSON.$G$1];[.$K243];[$JSON.$H$1];[.$O243];[$JSON.$I$1];[.$Q243];[$JSON.$J$1];[.$S243];[$JSON.$K$1];[.$A243];[$JSON.$L$1];[.$B243];[$JSON.$M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level&quot;:3,&quot;color&quot;:1,&quot;term&quot;:0,&quot;trait&quot;:0,&quot;legacy&quot;:4,&quot;orderTable&quot;:242,&quot;orderDeck&quot;:72}," calcext:value-type="string">
            <text:p>{"id":"3-14","name":"ジョージ・スチーブンソン","imageUrl":"https://one-draw.jp/ijinden/cardlist/003/card/03_014.png","expansion":35,"type":1,"level":3,"color":1,"term":0,"trait":0,"legacy":4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JSON.$A$1];[.$C244];[$JSON.$B$1];[.$E244];[$JSON.$C$1];[.$T244];[$JSON.$D$1];[.$G244];[$JSON.$E$1];[.$I244];[$JSON.$F$1];[.$L244];[$JSON.$G$1];[.$K244];[$JSON.$H$1];[.$O244];[$JSON.$I$1];[.$Q244];[$JSON.$J$1];[.$S244];[$JSON.$K$1];[.$A244];[$JSON.$L$1];[.$B244];[$JSON.$M$1])" office:value-type="string" office:string-value="{&quot;id&quot;:&quot;3-15&quot;,&quot;name&quot;:&quot;淀殿&quot;,&quot;imageUrl&quot;:&quot;https://one-draw.jp/ijinden/cardlist/003/card/03_015.png&quot;,&quot;expansion&quot;:35,&quot;type&quot;:1,&quot;level&quot;:5,&quot;color&quot;:1,&quot;term&quot;:0,&quot;trait&quot;:0,&quot;legacy&quot;:4,&quot;orderTable&quot;:243,&quot;orderDeck&quot;:151}," calcext:value-type="string">
            <text:p>{"id":"3-15","name":"淀殿","imageUrl":"https://one-draw.jp/ijinden/cardlist/003/card/03_015.png","expansion":35,"type":1,"level":5,"color":1,"term":0,"trait":0,"legacy":4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JSON.$A$1];[.$C245];[$JSON.$B$1];[.$E245];[$JSON.$C$1];[.$T245];[$JSON.$D$1];[.$G245];[$JSON.$E$1];[.$I245];[$JSON.$F$1];[.$L245];[$JSON.$G$1];[.$K245];[$JSON.$H$1];[.$O245];[$JSON.$I$1];[.$Q245];[$JSON.$J$1];[.$S245];[$JSON.$K$1];[.$A245];[$JSON.$L$1];[.$B245];[$JSON.$M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level&quot;:1,&quot;color&quot;:1,&quot;term&quot;:0,&quot;trait&quot;:0,&quot;legacy&quot;:0,&quot;orderTable&quot;:244,&quot;orderDeck&quot;:5}," calcext:value-type="string">
            <text:p>{"id":"3-16","name":"ジョージ・ワシントン","imageUrl":"https://one-draw.jp/ijinden/cardlist/003/card/03_016.png","expansion":35,"type":1,"level":1,"color":1,"term":0,"trait":0,"legacy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4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JSON.$A$1];[.$C246];[$JSON.$B$1];[.$E246];[$JSON.$C$1];[.$T246];[$JSON.$D$1];[.$G246];[$JSON.$E$1];[.$I246];[$JSON.$F$1];[.$L246];[$JSON.$G$1];[.$K246];[$JSON.$H$1];[.$O246];[$JSON.$I$1];[.$Q246];[$JSON.$J$1];[.$S246];[$JSON.$K$1];[.$A246];[$JSON.$L$1];[.$B246];[$JSON.$M$1])" office:value-type="string" office:string-value="{&quot;id&quot;:&quot;3-17&quot;,&quot;name&quot;:&quot;大塩平八郎&quot;,&quot;imageUrl&quot;:&quot;https://one-draw.jp/ijinden/cardlist/003/card/03_017.png&quot;,&quot;expansion&quot;:35,&quot;type&quot;:1,&quot;level&quot;:8,&quot;color&quot;:1,&quot;term&quot;:4,&quot;trait&quot;:0,&quot;legacy&quot;:4,&quot;orderTable&quot;:245,&quot;orderDeck&quot;:219}," calcext:value-type="string">
            <text:p>{"id":"3-17","name":"大塩平八郎","imageUrl":"https://one-draw.jp/ijinden/cardlist/003/card/03_017.png","expansion":35,"type":1,"level":8,"color":1,"term":4,"trait":0,"legacy":4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JSON.$A$1];[.$C247];[$JSON.$B$1];[.$E247];[$JSON.$C$1];[.$T247];[$JSON.$D$1];[.$G247];[$JSON.$E$1];[.$I247];[$JSON.$F$1];[.$L247];[$JSON.$G$1];[.$K247];[$JSON.$H$1];[.$O247];[$JSON.$I$1];[.$Q247];[$JSON.$J$1];[.$S247];[$JSON.$K$1];[.$A247];[$JSON.$L$1];[.$B247];[$JSON.$M$1])" office:value-type="string" office:string-value="{&quot;id&quot;:&quot;3-18&quot;,&quot;name&quot;:&quot;水野忠邦&quot;,&quot;imageUrl&quot;:&quot;https://one-draw.jp/ijinden/cardlist/003/card/03_018.png&quot;,&quot;expansion&quot;:35,&quot;type&quot;:1,&quot;level&quot;:6,&quot;color&quot;:1,&quot;term&quot;:0,&quot;trait&quot;:0,&quot;legacy&quot;:0,&quot;orderTable&quot;:246,&quot;orderDeck&quot;:183}," calcext:value-type="string">
            <text:p>{"id":"3-18","name":"水野忠邦","imageUrl":"https://one-draw.jp/ijinden/cardlist/003/card/03_018.png","expansion":35,"type":1,"level":6,"color":1,"term":0,"trait":0,"legacy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48];[$特性番号.$A$1:$特性番号.$B$8];2;0);0)" office:value-type="float" office:value="1" calcext:value-type="float">
            <text:p>1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48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JSON.$A$1];[.$C248];[$JSON.$B$1];[.$E248];[$JSON.$C$1];[.$T248];[$JSON.$D$1];[.$G248];[$JSON.$E$1];[.$I248];[$JSON.$F$1];[.$L248];[$JSON.$G$1];[.$K248];[$JSON.$H$1];[.$O248];[$JSON.$I$1];[.$Q248];[$JSON.$J$1];[.$S248];[$JSON.$K$1];[.$A248];[$JSON.$L$1];[.$B248];[$JSON.$M$1])" office:value-type="string" office:string-value="{&quot;id&quot;:&quot;3-19&quot;,&quot;name&quot;:&quot;伊達政宗&quot;,&quot;imageUrl&quot;:&quot;https://one-draw.jp/ijinden/cardlist/003/card/03_019.png&quot;,&quot;expansion&quot;:35,&quot;type&quot;:1,&quot;level&quot;:8,&quot;color&quot;:2,&quot;term&quot;:0,&quot;trait&quot;:1,&quot;legacy&quot;:6,&quot;orderTable&quot;:247,&quot;orderDeck&quot;:220}," calcext:value-type="string">
            <text:p>{"id":"3-19","name":"伊達政宗","imageUrl":"https://one-draw.jp/ijinden/cardlist/003/card/03_019.png","expansion":35,"type":1,"level":8,"color":2,"term":0,"trait":1,"legacy":6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4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JSON.$A$1];[.$C249];[$JSON.$B$1];[.$E249];[$JSON.$C$1];[.$T249];[$JSON.$D$1];[.$G249];[$JSON.$E$1];[.$I249];[$JSON.$F$1];[.$L249];[$JSON.$G$1];[.$K249];[$JSON.$H$1];[.$O249];[$JSON.$I$1];[.$Q249];[$JSON.$J$1];[.$S249];[$JSON.$K$1];[.$A249];[$JSON.$L$1];[.$B249];[$JSON.$M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level&quot;:6,&quot;color&quot;:2,&quot;term&quot;:1,&quot;trait&quot;:0,&quot;legacy&quot;:0,&quot;orderTable&quot;:248,&quot;orderDeck&quot;:189}," calcext:value-type="string">
            <text:p>{"id":"3-20","name":"バルトロメウ=ディアス","imageUrl":"https://one-draw.jp/ijinden/cardlist/003/card/03_020.png","expansion":35,"type":1,"level":6,"color":2,"term":1,"trait":0,"legacy":0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50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JSON.$A$1];[.$C250];[$JSON.$B$1];[.$E250];[$JSON.$C$1];[.$T250];[$JSON.$D$1];[.$G250];[$JSON.$E$1];[.$I250];[$JSON.$F$1];[.$L250];[$JSON.$G$1];[.$K250];[$JSON.$H$1];[.$O250];[$JSON.$I$1];[.$Q250];[$JSON.$J$1];[.$S250];[$JSON.$K$1];[.$A250];[$JSON.$L$1];[.$B250];[$JSON.$M$1])" office:value-type="string" office:string-value="{&quot;id&quot;:&quot;3-21&quot;,&quot;name&quot;:&quot;木戸孝允&quot;,&quot;imageUrl&quot;:&quot;https://one-draw.jp/ijinden/cardlist/003/card/03_021.png&quot;,&quot;expansion&quot;:35,&quot;type&quot;:1,&quot;level&quot;:1,&quot;color&quot;:2,&quot;term&quot;:0,&quot;trait&quot;:8,&quot;legacy&quot;:4,&quot;orderTable&quot;:249,&quot;orderDeck&quot;:9}," calcext:value-type="string">
            <text:p>{"id":"3-21","name":"木戸孝允","imageUrl":"https://one-draw.jp/ijinden/cardlist/003/card/03_021.png","expansion":35,"type":1,"level":1,"color":2,"term":0,"trait":8,"legacy":4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思想</text:p>
          </table:table-cell>
          <table:table-cell table:formula="of:=IFERROR(VLOOKUP([.$P251];[$特性番号.$A$1:$特性番号.$B$8];2;0);0)" office:value-type="float" office:value="8" calcext:value-type="float">
            <text:p>8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JSON.$A$1];[.$C251];[$JSON.$B$1];[.$E251];[$JSON.$C$1];[.$T251];[$JSON.$D$1];[.$G251];[$JSON.$E$1];[.$I251];[$JSON.$F$1];[.$L251];[$JSON.$G$1];[.$K251];[$JSON.$H$1];[.$O251];[$JSON.$I$1];[.$Q251];[$JSON.$J$1];[.$S251];[$JSON.$K$1];[.$A251];[$JSON.$L$1];[.$B251];[$JSON.$M$1])" office:value-type="string" office:string-value="{&quot;id&quot;:&quot;3-22&quot;,&quot;name&quot;:&quot;高杉晋作&quot;,&quot;imageUrl&quot;:&quot;https://one-draw.jp/ijinden/cardlist/003/card/03_022.png&quot;,&quot;expansion&quot;:35,&quot;type&quot;:1,&quot;level&quot;:2,&quot;color&quot;:2,&quot;term&quot;:8,&quot;trait&quot;:8,&quot;legacy&quot;:0,&quot;orderTable&quot;:250,&quot;orderDeck&quot;:40}," calcext:value-type="string">
            <text:p>{"id":"3-22","name":"高杉晋作","imageUrl":"https://one-draw.jp/ijinden/cardlist/003/card/03_022.png","expansion":35,"type":1,"level":2,"color":2,"term":8,"trait":8,"legacy":0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JSON.$A$1];[.$C252];[$JSON.$B$1];[.$E252];[$JSON.$C$1];[.$T252];[$JSON.$D$1];[.$G252];[$JSON.$E$1];[.$I252];[$JSON.$F$1];[.$L252];[$JSON.$G$1];[.$K252];[$JSON.$H$1];[.$O252];[$JSON.$I$1];[.$Q252];[$JSON.$J$1];[.$S252];[$JSON.$K$1];[.$A252];[$JSON.$L$1];[.$B252];[$JSON.$M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level&quot;:4,&quot;color&quot;:2,&quot;term&quot;:0,&quot;trait&quot;:0,&quot;legacy&quot;:4,&quot;orderTable&quot;:251,&quot;orderDeck&quot;:121}," calcext:value-type="string">
            <text:p>{"id":"3-23","name":"トマス・ニューコメン","imageUrl":"https://one-draw.jp/ijinden/cardlist/003/card/03_023.png","expansion":35,"type":1,"level":4,"color":2,"term":0,"trait":0,"legacy":4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JSON.$A$1];[.$C253];[$JSON.$B$1];[.$E253];[$JSON.$C$1];[.$T253];[$JSON.$D$1];[.$G253];[$JSON.$E$1];[.$I253];[$JSON.$F$1];[.$L253];[$JSON.$G$1];[.$K253];[$JSON.$H$1];[.$O253];[$JSON.$I$1];[.$Q253];[$JSON.$J$1];[.$S253];[$JSON.$K$1];[.$A253];[$JSON.$L$1];[.$B253];[$JSON.$M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level&quot;:5,&quot;color&quot;:2,&quot;term&quot;:0,&quot;trait&quot;:0,&quot;legacy&quot;:0,&quot;orderTable&quot;:252,&quot;orderDeck&quot;:161}," calcext:value-type="string">
            <text:p>{"id":"3-24","name":"アダム・ラクスマン","imageUrl":"https://one-draw.jp/ijinden/cardlist/003/card/03_024.png","expansion":35,"type":1,"level":5,"color":2,"term":0,"trait":0,"legacy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JSON.$A$1];[.$C254];[$JSON.$B$1];[.$E254];[$JSON.$C$1];[.$T254];[$JSON.$D$1];[.$G254];[$JSON.$E$1];[.$I254];[$JSON.$F$1];[.$L254];[$JSON.$G$1];[.$K254];[$JSON.$H$1];[.$O254];[$JSON.$I$1];[.$Q254];[$JSON.$J$1];[.$S254];[$JSON.$K$1];[.$A254];[$JSON.$L$1];[.$B254];[$JSON.$M$1])" office:value-type="string" office:string-value="{&quot;id&quot;:&quot;3-25&quot;,&quot;name&quot;:&quot;大黒屋光太夫&quot;,&quot;imageUrl&quot;:&quot;https://one-draw.jp/ijinden/cardlist/003/card/03_025.png&quot;,&quot;expansion&quot;:35,&quot;type&quot;:1,&quot;level&quot;:2,&quot;color&quot;:2,&quot;term&quot;:1,&quot;trait&quot;:0,&quot;legacy&quot;:4,&quot;orderTable&quot;:253,&quot;orderDeck&quot;:41}," calcext:value-type="string">
            <text:p>{"id":"3-25","name":"大黒屋光太夫","imageUrl":"https://one-draw.jp/ijinden/cardlist/003/card/03_025.png","expansion":35,"type":1,"level":2,"color":2,"term":1,"trait":0,"legacy":4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JSON.$A$1];[.$C255];[$JSON.$B$1];[.$E255];[$JSON.$C$1];[.$T255];[$JSON.$D$1];[.$G255];[$JSON.$E$1];[.$I255];[$JSON.$F$1];[.$L255];[$JSON.$G$1];[.$K255];[$JSON.$H$1];[.$O255];[$JSON.$I$1];[.$Q255];[$JSON.$J$1];[.$S255];[$JSON.$K$1];[.$A255];[$JSON.$L$1];[.$B255];[$JSON.$M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level&quot;:1,&quot;color&quot;:2,&quot;term&quot;:1,&quot;trait&quot;:0,&quot;legacy&quot;:0,&quot;orderTable&quot;:254,&quot;orderDeck&quot;:10}," calcext:value-type="string">
            <text:p>{"id":"3-26","name":"ニコライ・レザノフ","imageUrl":"https://one-draw.jp/ijinden/cardlist/003/card/03_026.png","expansion":35,"type":1,"level":1,"color":2,"term":1,"trait":0,"legacy":0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56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JSON.$A$1];[.$C256];[$JSON.$B$1];[.$E256];[$JSON.$C$1];[.$T256];[$JSON.$D$1];[.$G256];[$JSON.$E$1];[.$I256];[$JSON.$F$1];[.$L256];[$JSON.$G$1];[.$K256];[$JSON.$H$1];[.$O256];[$JSON.$I$1];[.$Q256];[$JSON.$J$1];[.$S256];[$JSON.$K$1];[.$A256];[$JSON.$L$1];[.$B256];[$JSON.$M$1])" office:value-type="string" office:string-value="{&quot;id&quot;:&quot;3-27&quot;,&quot;name&quot;:&quot;小野小町&quot;,&quot;imageUrl&quot;:&quot;https://one-draw.jp/ijinden/cardlist/003/card/03_027.png&quot;,&quot;expansion&quot;:35,&quot;type&quot;:1,&quot;level&quot;:3,&quot;color&quot;:4,&quot;term&quot;:2,&quot;trait&quot;:0,&quot;legacy&quot;:8,&quot;orderTable&quot;:255,&quot;orderDeck&quot;:90}," calcext:value-type="string">
            <text:p>{"id":"3-27","name":"小野小町","imageUrl":"https://one-draw.jp/ijinden/cardlist/003/card/03_027.png","expansion":35,"type":1,"level":3,"color":4,"term":2,"trait":0,"legacy":8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5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JSON.$A$1];[.$C257];[$JSON.$B$1];[.$E257];[$JSON.$C$1];[.$T257];[$JSON.$D$1];[.$G257];[$JSON.$E$1];[.$I257];[$JSON.$F$1];[.$L257];[$JSON.$G$1];[.$K257];[$JSON.$H$1];[.$O257];[$JSON.$I$1];[.$Q257];[$JSON.$J$1];[.$S257];[$JSON.$K$1];[.$A257];[$JSON.$L$1];[.$B257];[$JSON.$M$1])" office:value-type="string" office:string-value="{&quot;id&quot;:&quot;3-28&quot;,&quot;name&quot;:&quot;松尾芭蕉&quot;,&quot;imageUrl&quot;:&quot;https://one-draw.jp/ijinden/cardlist/003/card/03_028.png&quot;,&quot;expansion&quot;:35,&quot;type&quot;:1,&quot;level&quot;:3,&quot;color&quot;:4,&quot;term&quot;:2,&quot;trait&quot;:0,&quot;legacy&quot;:4,&quot;orderTable&quot;:256,&quot;orderDeck&quot;:91}," calcext:value-type="string">
            <text:p>{"id":"3-28","name":"松尾芭蕉","imageUrl":"https://one-draw.jp/ijinden/cardlist/003/card/03_028.png","expansion":35,"type":1,"level":3,"color":4,"term":2,"trait":0,"legacy":4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58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JSON.$A$1];[.$C258];[$JSON.$B$1];[.$E258];[$JSON.$C$1];[.$T258];[$JSON.$D$1];[.$G258];[$JSON.$E$1];[.$I258];[$JSON.$F$1];[.$L258];[$JSON.$G$1];[.$K258];[$JSON.$H$1];[.$O258];[$JSON.$I$1];[.$Q258];[$JSON.$J$1];[.$S258];[$JSON.$K$1];[.$A258];[$JSON.$L$1];[.$B258];[$JSON.$M$1])" office:value-type="string" office:string-value="{&quot;id&quot;:&quot;3-29&quot;,&quot;name&quot;:&quot;朱舜水&quot;,&quot;imageUrl&quot;:&quot;https://one-draw.jp/ijinden/cardlist/003/card/03_029.png&quot;,&quot;expansion&quot;:35,&quot;type&quot;:1,&quot;level&quot;:4,&quot;color&quot;:4,&quot;term&quot;:0,&quot;trait&quot;:0,&quot;legacy&quot;:8,&quot;orderTable&quot;:257,&quot;orderDeck&quot;:129}," calcext:value-type="string">
            <text:p>{"id":"3-29","name":"朱舜水","imageUrl":"https://one-draw.jp/ijinden/cardlist/003/card/03_029.png","expansion":35,"type":1,"level":4,"color":4,"term":0,"trait":0,"legacy":8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JSON.$A$1];[.$C259];[$JSON.$B$1];[.$E259];[$JSON.$C$1];[.$T259];[$JSON.$D$1];[.$G259];[$JSON.$E$1];[.$I259];[$JSON.$F$1];[.$L259];[$JSON.$G$1];[.$K259];[$JSON.$H$1];[.$O259];[$JSON.$I$1];[.$Q259];[$JSON.$J$1];[.$S259];[$JSON.$K$1];[.$A259];[$JSON.$L$1];[.$B259];[$JSON.$M$1])" office:value-type="string" office:string-value="{&quot;id&quot;:&quot;3-30&quot;,&quot;name&quot;:&quot;井原西鶴&quot;,&quot;imageUrl&quot;:&quot;https://one-draw.jp/ijinden/cardlist/003/card/03_030.png&quot;,&quot;expansion&quot;:35,&quot;type&quot;:1,&quot;level&quot;:2,&quot;color&quot;:4,&quot;term&quot;:2,&quot;trait&quot;:0,&quot;legacy&quot;:0,&quot;orderTable&quot;:258,&quot;orderDeck&quot;:48}," calcext:value-type="string">
            <text:p>{"id":"3-30","name":"井原西鶴","imageUrl":"https://one-draw.jp/ijinden/cardlist/003/card/03_030.png","expansion":35,"type":1,"level":2,"color":4,"term":2,"trait":0,"legacy":0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JSON.$A$1];[.$C260];[$JSON.$B$1];[.$E260];[$JSON.$C$1];[.$T260];[$JSON.$D$1];[.$G260];[$JSON.$E$1];[.$I260];[$JSON.$F$1];[.$L260];[$JSON.$G$1];[.$K260];[$JSON.$H$1];[.$O260];[$JSON.$I$1];[.$Q260];[$JSON.$J$1];[.$S260];[$JSON.$K$1];[.$A260];[$JSON.$L$1];[.$B260];[$JSON.$M$1])" office:value-type="string" office:string-value="{&quot;id&quot;:&quot;3-31&quot;,&quot;name&quot;:&quot;近松門左衛門&quot;,&quot;imageUrl&quot;:&quot;https://one-draw.jp/ijinden/cardlist/003/card/03_031.png&quot;,&quot;expansion&quot;:35,&quot;type&quot;:1,&quot;level&quot;:9,&quot;color&quot;:4,&quot;term&quot;:2,&quot;trait&quot;:0,&quot;legacy&quot;:0,&quot;orderTable&quot;:259,&quot;orderDeck&quot;:231}," calcext:value-type="string">
            <text:p>{"id":"3-31","name":"近松門左衛門","imageUrl":"https://one-draw.jp/ijinden/cardlist/003/card/03_031.png","expansion":35,"type":1,"level":9,"color":4,"term":2,"trait":0,"legacy":0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JSON.$A$1];[.$C261];[$JSON.$B$1];[.$E261];[$JSON.$C$1];[.$T261];[$JSON.$D$1];[.$G261];[$JSON.$E$1];[.$I261];[$JSON.$F$1];[.$L261];[$JSON.$G$1];[.$K261];[$JSON.$H$1];[.$O261];[$JSON.$I$1];[.$Q261];[$JSON.$J$1];[.$S261];[$JSON.$K$1];[.$A261];[$JSON.$L$1];[.$B261];[$JSON.$M$1])" office:value-type="string" office:string-value="{&quot;id&quot;:&quot;3-32&quot;,&quot;name&quot;:&quot;田沼意次&quot;,&quot;imageUrl&quot;:&quot;https://one-draw.jp/ijinden/cardlist/003/card/03_032.png&quot;,&quot;expansion&quot;:35,&quot;type&quot;:1,&quot;level&quot;:1,&quot;color&quot;:4,&quot;term&quot;:0,&quot;trait&quot;:0,&quot;legacy&quot;:0,&quot;orderTable&quot;:260,&quot;orderDeck&quot;:14}," calcext:value-type="string">
            <text:p>{"id":"3-32","name":"田沼意次","imageUrl":"https://one-draw.jp/ijinden/cardlist/003/card/03_032.png","expansion":35,"type":1,"level":1,"color":4,"term":0,"trait":0,"legacy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62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JSON.$A$1];[.$C262];[$JSON.$B$1];[.$E262];[$JSON.$C$1];[.$T262];[$JSON.$D$1];[.$G262];[$JSON.$E$1];[.$I262];[$JSON.$F$1];[.$L262];[$JSON.$G$1];[.$K262];[$JSON.$H$1];[.$O262];[$JSON.$I$1];[.$Q262];[$JSON.$J$1];[.$S262];[$JSON.$K$1];[.$A262];[$JSON.$L$1];[.$B262];[$JSON.$M$1])" office:value-type="string" office:string-value="{&quot;id&quot;:&quot;3-33&quot;,&quot;name&quot;:&quot;高野長英&quot;,&quot;imageUrl&quot;:&quot;https://one-draw.jp/ijinden/cardlist/003/card/03_033.png&quot;,&quot;expansion&quot;:35,&quot;type&quot;:1,&quot;level&quot;:2,&quot;color&quot;:4,&quot;term&quot;:0,&quot;trait&quot;:16,&quot;legacy&quot;:4,&quot;orderTable&quot;:261,&quot;orderDeck&quot;:49}," calcext:value-type="string">
            <text:p>{"id":"3-33","name":"高野長英","imageUrl":"https://one-draw.jp/ijinden/cardlist/003/card/03_033.png","expansion":35,"type":1,"level":2,"color":4,"term":0,"trait":16,"legacy":4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3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6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JSON.$A$1];[.$C263];[$JSON.$B$1];[.$E263];[$JSON.$C$1];[.$T263];[$JSON.$D$1];[.$G263];[$JSON.$E$1];[.$I263];[$JSON.$F$1];[.$L263];[$JSON.$G$1];[.$K263];[$JSON.$H$1];[.$O263];[$JSON.$I$1];[.$Q263];[$JSON.$J$1];[.$S263];[$JSON.$K$1];[.$A263];[$JSON.$L$1];[.$B263];[$JSON.$M$1])" office:value-type="string" office:string-value="{&quot;id&quot;:&quot;3-34&quot;,&quot;name&quot;:&quot;菱川師宣&quot;,&quot;imageUrl&quot;:&quot;https://one-draw.jp/ijinden/cardlist/003/card/03_034.png&quot;,&quot;expansion&quot;:35,&quot;type&quot;:1,&quot;level&quot;:6,&quot;color&quot;:4,&quot;term&quot;:0,&quot;trait&quot;:2,&quot;legacy&quot;:1,&quot;orderTable&quot;:262,&quot;orderDeck&quot;:195}," calcext:value-type="string">
            <text:p>{"id":"3-34","name":"菱川師宣","imageUrl":"https://one-draw.jp/ijinden/cardlist/003/card/03_034.png","expansion":35,"type":1,"level":6,"color":4,"term":0,"trait":2,"legacy":1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6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JSON.$A$1];[.$C264];[$JSON.$B$1];[.$E264];[$JSON.$C$1];[.$T264];[$JSON.$D$1];[.$G264];[$JSON.$E$1];[.$I264];[$JSON.$F$1];[.$L264];[$JSON.$G$1];[.$K264];[$JSON.$H$1];[.$O264];[$JSON.$I$1];[.$Q264];[$JSON.$J$1];[.$S264];[$JSON.$K$1];[.$A264];[$JSON.$L$1];[.$B264];[$JSON.$M$1])" office:value-type="string" office:string-value="{&quot;id&quot;:&quot;3-35&quot;,&quot;name&quot;:&quot;徳川吉宗&quot;,&quot;imageUrl&quot;:&quot;https://one-draw.jp/ijinden/cardlist/003/card/03_035.png&quot;,&quot;expansion&quot;:35,&quot;type&quot;:1,&quot;level&quot;:5,&quot;color&quot;:8,&quot;term&quot;:0,&quot;trait&quot;:0,&quot;legacy&quot;:6,&quot;orderTable&quot;:263,&quot;orderDeck&quot;:175}," calcext:value-type="string">
            <text:p>{"id":"3-35","name":"徳川吉宗","imageUrl":"https://one-draw.jp/ijinden/cardlist/003/card/03_035.png","expansion":35,"type":1,"level":5,"color":8,"term":0,"trait":0,"legacy":6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5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6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JSON.$A$1];[.$C265];[$JSON.$B$1];[.$E265];[$JSON.$C$1];[.$T265];[$JSON.$D$1];[.$G265];[$JSON.$E$1];[.$I265];[$JSON.$F$1];[.$L265];[$JSON.$G$1];[.$K265];[$JSON.$H$1];[.$O265];[$JSON.$I$1];[.$Q265];[$JSON.$J$1];[.$S265];[$JSON.$K$1];[.$A265];[$JSON.$L$1];[.$B265];[$JSON.$M$1])" office:value-type="string" office:string-value="{&quot;id&quot;:&quot;3-36&quot;,&quot;name&quot;:&quot;雪舟&quot;,&quot;imageUrl&quot;:&quot;https://one-draw.jp/ijinden/cardlist/003/card/03_036.png&quot;,&quot;expansion&quot;:35,&quot;type&quot;:1,&quot;level&quot;:1,&quot;color&quot;:8,&quot;term&quot;:0,&quot;trait&quot;:2,&quot;legacy&quot;:4,&quot;orderTable&quot;:264,&quot;orderDeck&quot;:19}," calcext:value-type="string">
            <text:p>{"id":"3-36","name":"雪舟","imageUrl":"https://one-draw.jp/ijinden/cardlist/003/card/03_036.png","expansion":35,"type":1,"level":1,"color":8,"term":0,"trait":2,"legacy":4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6];[$特性番号.$A$1:$特性番号.$B$8];2;0);0)" office:value-type="float" office:value="2" calcext:value-type="float">
            <text:p>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JSON.$A$1];[.$C266];[$JSON.$B$1];[.$E266];[$JSON.$C$1];[.$T266];[$JSON.$D$1];[.$G266];[$JSON.$E$1];[.$I266];[$JSON.$F$1];[.$L266];[$JSON.$G$1];[.$K266];[$JSON.$H$1];[.$O266];[$JSON.$I$1];[.$Q266];[$JSON.$J$1];[.$S266];[$JSON.$K$1];[.$A266];[$JSON.$L$1];[.$B266];[$JSON.$M$1])" office:value-type="string" office:string-value="{&quot;id&quot;:&quot;3-37&quot;,&quot;name&quot;:&quot;俵屋宗達&quot;,&quot;imageUrl&quot;:&quot;https://one-draw.jp/ijinden/cardlist/003/card/03_037.png&quot;,&quot;expansion&quot;:35,&quot;type&quot;:1,&quot;level&quot;:6,&quot;color&quot;:8,&quot;term&quot;:0,&quot;trait&quot;:2,&quot;legacy&quot;:0,&quot;orderTable&quot;:265,&quot;orderDeck&quot;:198}," calcext:value-type="string">
            <text:p>{"id":"3-37","name":"俵屋宗達","imageUrl":"https://one-draw.jp/ijinden/cardlist/003/card/03_037.png","expansion":35,"type":1,"level":6,"color":8,"term":0,"trait":2,"legacy":0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267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JSON.$A$1];[.$C267];[$JSON.$B$1];[.$E267];[$JSON.$C$1];[.$T267];[$JSON.$D$1];[.$G267];[$JSON.$E$1];[.$I267];[$JSON.$F$1];[.$L267];[$JSON.$G$1];[.$K267];[$JSON.$H$1];[.$O267];[$JSON.$I$1];[.$Q267];[$JSON.$J$1];[.$S267];[$JSON.$K$1];[.$A267];[$JSON.$L$1];[.$B267];[$JSON.$M$1])" office:value-type="string" office:string-value="{&quot;id&quot;:&quot;3-38&quot;,&quot;name&quot;:&quot;司馬炎&quot;,&quot;imageUrl&quot;:&quot;https://one-draw.jp/ijinden/cardlist/003/card/03_038.png&quot;,&quot;expansion&quot;:35,&quot;type&quot;:1,&quot;level&quot;:9,&quot;color&quot;:8,&quot;term&quot;:0,&quot;trait&quot;:0,&quot;legacy&quot;:6,&quot;orderTable&quot;:266,&quot;orderDeck&quot;:233}," calcext:value-type="string">
            <text:p>{"id":"3-38","name":"司馬炎","imageUrl":"https://one-draw.jp/ijinden/cardlist/003/card/03_038.png","expansion":35,"type":1,"level":9,"color":8,"term":0,"trait":0,"legacy":6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6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JSON.$A$1];[.$C268];[$JSON.$B$1];[.$E268];[$JSON.$C$1];[.$T268];[$JSON.$D$1];[.$G268];[$JSON.$E$1];[.$I268];[$JSON.$F$1];[.$L268];[$JSON.$G$1];[.$K268];[$JSON.$H$1];[.$O268];[$JSON.$I$1];[.$Q268];[$JSON.$J$1];[.$S268];[$JSON.$K$1];[.$A268];[$JSON.$L$1];[.$B268];[$JSON.$M$1])" office:value-type="string" office:string-value="{&quot;id&quot;:&quot;3-39&quot;,&quot;name&quot;:&quot;井伊直弼&quot;,&quot;imageUrl&quot;:&quot;https://one-draw.jp/ijinden/cardlist/003/card/03_039.png&quot;,&quot;expansion&quot;:35,&quot;type&quot;:1,&quot;level&quot;:8,&quot;color&quot;:8,&quot;term&quot;:0,&quot;trait&quot;:0,&quot;legacy&quot;:1,&quot;orderTable&quot;:267,&quot;orderDeck&quot;:227}," calcext:value-type="string">
            <text:p>{"id":"3-39","name":"井伊直弼","imageUrl":"https://one-draw.jp/ijinden/cardlist/003/card/03_039.png","expansion":35,"type":1,"level":8,"color":8,"term":0,"trait":0,"legacy":1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6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JSON.$A$1];[.$C269];[$JSON.$B$1];[.$E269];[$JSON.$C$1];[.$T269];[$JSON.$D$1];[.$G269];[$JSON.$E$1];[.$I269];[$JSON.$F$1];[.$L269];[$JSON.$G$1];[.$K269];[$JSON.$H$1];[.$O269];[$JSON.$I$1];[.$Q269];[$JSON.$J$1];[.$S269];[$JSON.$K$1];[.$A269];[$JSON.$L$1];[.$B269];[$JSON.$M$1])" office:value-type="string" office:string-value="{&quot;id&quot;:&quot;3-40&quot;,&quot;name&quot;:&quot;徳川家茂&quot;,&quot;imageUrl&quot;:&quot;https://one-draw.jp/ijinden/cardlist/003/card/03_040.png&quot;,&quot;expansion&quot;:35,&quot;type&quot;:1,&quot;level&quot;:3,&quot;color&quot;:8,&quot;term&quot;:0,&quot;trait&quot;:0,&quot;legacy&quot;:0,&quot;orderTable&quot;:268,&quot;orderDeck&quot;:98}," calcext:value-type="string">
            <text:p>{"id":"3-40","name":"徳川家茂","imageUrl":"https://one-draw.jp/ijinden/cardlist/003/card/03_040.png","expansion":35,"type":1,"level":3,"color":8,"term":0,"trait":0,"legacy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70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JSON.$A$1];[.$C270];[$JSON.$B$1];[.$E270];[$JSON.$C$1];[.$T270];[$JSON.$D$1];[.$G270];[$JSON.$E$1];[.$I270];[$JSON.$F$1];[.$L270];[$JSON.$G$1];[.$K270];[$JSON.$H$1];[.$O270];[$JSON.$I$1];[.$Q270];[$JSON.$J$1];[.$S270];[$JSON.$K$1];[.$A270];[$JSON.$L$1];[.$B270];[$JSON.$M$1])" office:value-type="string" office:string-value="{&quot;id&quot;:&quot;3-41&quot;,&quot;name&quot;:&quot;松平定信&quot;,&quot;imageUrl&quot;:&quot;https://one-draw.jp/ijinden/cardlist/003/card/03_041.png&quot;,&quot;expansion&quot;:35,&quot;type&quot;:1,&quot;level&quot;:7,&quot;color&quot;:8,&quot;term&quot;:0,&quot;trait&quot;:0,&quot;legacy&quot;:7,&quot;orderTable&quot;:269,&quot;orderDeck&quot;:216}," calcext:value-type="string">
            <text:p>{"id":"3-41","name":"松平定信","imageUrl":"https://one-draw.jp/ijinden/cardlist/003/card/03_041.png","expansion":35,"type":1,"level":7,"color":8,"term":0,"trait":0,"legacy":7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JSON.$A$1];[.$C271];[$JSON.$B$1];[.$E271];[$JSON.$C$1];[.$T271];[$JSON.$D$1];[.$G271];[$JSON.$E$1];[.$I271];[$JSON.$F$1];[.$L271];[$JSON.$G$1];[.$K271];[$JSON.$H$1];[.$O271];[$JSON.$I$1];[.$Q271];[$JSON.$J$1];[.$S271];[$JSON.$K$1];[.$A271];[$JSON.$L$1];[.$B271];[$JSON.$M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level&quot;:2,&quot;color&quot;:8,&quot;term&quot;:2,&quot;trait&quot;:0,&quot;legacy&quot;:0,&quot;orderTable&quot;:270,&quot;orderDeck&quot;:56}," calcext:value-type="string">
            <text:p>{"id":"3-42","name":"ルイス・キャロル","imageUrl":"https://one-draw.jp/ijinden/cardlist/003/card/03_042.png","expansion":35,"type":1,"level":2,"color":8,"term":2,"trait":0,"legacy":0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72];[$特性番号.$A$1:$特性番号.$B$8];2;0);0)" office:value-type="float" office:value="32" calcext:value-type="float">
            <text:p>3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27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JSON.$A$1];[.$C272];[$JSON.$B$1];[.$E272];[$JSON.$C$1];[.$T272];[$JSON.$D$1];[.$G272];[$JSON.$E$1];[.$I272];[$JSON.$F$1];[.$L272];[$JSON.$G$1];[.$K272];[$JSON.$H$1];[.$O272];[$JSON.$I$1];[.$Q272];[$JSON.$J$1];[.$S272];[$JSON.$K$1];[.$A272];[$JSON.$L$1];[.$B272];[$JSON.$M$1])" office:value-type="string" office:string-value="{&quot;id&quot;:&quot;3-43&quot;,&quot;name&quot;:&quot;芹沢鴨&quot;,&quot;imageUrl&quot;:&quot;https://one-draw.jp/ijinden/cardlist/003/card/03_043.png&quot;,&quot;expansion&quot;:35,&quot;type&quot;:1,&quot;level&quot;:1,&quot;color&quot;:16,&quot;term&quot;:0,&quot;trait&quot;:32,&quot;legacy&quot;:4,&quot;orderTable&quot;:271,&quot;orderDeck&quot;:21}," calcext:value-type="string">
            <text:p>{"id":"3-43","name":"芹沢鴨","imageUrl":"https://one-draw.jp/ijinden/cardlist/003/card/03_043.png","expansion":35,"type":1,"level":1,"color":16,"term":0,"trait":32,"legacy":4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73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73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JSON.$A$1];[.$C273];[$JSON.$B$1];[.$E273];[$JSON.$C$1];[.$T273];[$JSON.$D$1];[.$G273];[$JSON.$E$1];[.$I273];[$JSON.$F$1];[.$L273];[$JSON.$G$1];[.$K273];[$JSON.$H$1];[.$O273];[$JSON.$I$1];[.$Q273];[$JSON.$J$1];[.$S273];[$JSON.$K$1];[.$A273];[$JSON.$L$1];[.$B273];[$JSON.$M$1])" office:value-type="string" office:string-value="{&quot;id&quot;:&quot;3-44&quot;,&quot;name&quot;:&quot;本居宣長&quot;,&quot;imageUrl&quot;:&quot;https://one-draw.jp/ijinden/cardlist/003/card/03_044.png&quot;,&quot;expansion&quot;:35,&quot;type&quot;:1,&quot;level&quot;:4,&quot;color&quot;:16,&quot;term&quot;:0,&quot;trait&quot;:16,&quot;legacy&quot;:8,&quot;orderTable&quot;:272,&quot;orderDeck&quot;:141}," calcext:value-type="string">
            <text:p>{"id":"3-44","name":"本居宣長","imageUrl":"https://one-draw.jp/ijinden/cardlist/003/card/03_044.png","expansion":35,"type":1,"level":4,"color":16,"term":0,"trait":16,"legacy":8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JSON.$A$1];[.$C274];[$JSON.$B$1];[.$E274];[$JSON.$C$1];[.$T274];[$JSON.$D$1];[.$G274];[$JSON.$E$1];[.$I274];[$JSON.$F$1];[.$L274];[$JSON.$G$1];[.$K274];[$JSON.$H$1];[.$O274];[$JSON.$I$1];[.$Q274];[$JSON.$J$1];[.$S274];[$JSON.$K$1];[.$A274];[$JSON.$L$1];[.$B274];[$JSON.$M$1])" office:value-type="string" office:string-value="{&quot;id&quot;:&quot;3-45&quot;,&quot;name&quot;:&quot;坂本龍馬&quot;,&quot;imageUrl&quot;:&quot;https://one-draw.jp/ijinden/cardlist/003/card/03_045.png&quot;,&quot;expansion&quot;:35,&quot;type&quot;:1,&quot;level&quot;:3,&quot;color&quot;:16,&quot;term&quot;:0,&quot;trait&quot;:0,&quot;legacy&quot;:0,&quot;orderTable&quot;:273,&quot;orderDeck&quot;:103}," calcext:value-type="string">
            <text:p>{"id":"3-45","name":"坂本龍馬","imageUrl":"https://one-draw.jp/ijinden/cardlist/003/card/03_045.png","expansion":35,"type":1,"level":3,"color":16,"term":0,"trait":0,"legacy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75];[$特性番号.$A$1:$特性番号.$B$8];2;0);0)" office:value-type="float" office:value="32" calcext:value-type="float">
            <text:p>32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JSON.$A$1];[.$C275];[$JSON.$B$1];[.$E275];[$JSON.$C$1];[.$T275];[$JSON.$D$1];[.$G275];[$JSON.$E$1];[.$I275];[$JSON.$F$1];[.$L275];[$JSON.$G$1];[.$K275];[$JSON.$H$1];[.$O275];[$JSON.$I$1];[.$Q275];[$JSON.$J$1];[.$S275];[$JSON.$K$1];[.$A275];[$JSON.$L$1];[.$B275];[$JSON.$M$1])" office:value-type="string" office:string-value="{&quot;id&quot;:&quot;3-46&quot;,&quot;name&quot;:&quot;近藤勇&quot;,&quot;imageUrl&quot;:&quot;https://one-draw.jp/ijinden/cardlist/003/card/03_046.png&quot;,&quot;expansion&quot;:35,&quot;type&quot;:1,&quot;level&quot;:7,&quot;color&quot;:16,&quot;term&quot;:0,&quot;trait&quot;:32,&quot;legacy&quot;:0,&quot;orderTable&quot;:274,&quot;orderDeck&quot;:218}," calcext:value-type="string">
            <text:p>{"id":"3-46","name":"近藤勇","imageUrl":"https://one-draw.jp/ijinden/cardlist/003/card/03_046.png","expansion":35,"type":1,"level":7,"color":16,"term":0,"trait":32,"legacy":0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6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6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JSON.$A$1];[.$C276];[$JSON.$B$1];[.$E276];[$JSON.$C$1];[.$T276];[$JSON.$D$1];[.$G276];[$JSON.$E$1];[.$I276];[$JSON.$F$1];[.$L276];[$JSON.$G$1];[.$K276];[$JSON.$H$1];[.$O276];[$JSON.$I$1];[.$Q276];[$JSON.$J$1];[.$S276];[$JSON.$K$1];[.$A276];[$JSON.$L$1];[.$B276];[$JSON.$M$1])" office:value-type="string" office:string-value="{&quot;id&quot;:&quot;3-47&quot;,&quot;name&quot;:&quot;徳川慶喜&quot;,&quot;imageUrl&quot;:&quot;https://one-draw.jp/ijinden/cardlist/003/card/03_047.png&quot;,&quot;expansion&quot;:35,&quot;type&quot;:1,&quot;level&quot;:1,&quot;color&quot;:16,&quot;term&quot;:0,&quot;trait&quot;:0,&quot;legacy&quot;:0,&quot;orderTable&quot;:275,&quot;orderDeck&quot;:22}," calcext:value-type="string">
            <text:p>{"id":"3-47","name":"徳川慶喜","imageUrl":"https://one-draw.jp/ijinden/cardlist/003/card/03_047.png","expansion":35,"type":1,"level":1,"color":16,"term":0,"trait":0,"legacy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JSON.$A$1];[.$C277];[$JSON.$B$1];[.$E277];[$JSON.$C$1];[.$T277];[$JSON.$D$1];[.$G277];[$JSON.$E$1];[.$I277];[$JSON.$F$1];[.$L277];[$JSON.$G$1];[.$K277];[$JSON.$H$1];[.$O277];[$JSON.$I$1];[.$Q277];[$JSON.$J$1];[.$S277];[$JSON.$K$1];[.$A277];[$JSON.$L$1];[.$B277];[$JSON.$M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level&quot;:4,&quot;color&quot;:16,&quot;term&quot;:1,&quot;trait&quot;:0,&quot;legacy&quot;:0,&quot;orderTable&quot;:276,&quot;orderDeck&quot;:142}," calcext:value-type="string">
            <text:p>{"id":"3-48","name":"マシュー・カルブレイス・ペリー","imageUrl":"https://one-draw.jp/ijinden/cardlist/003/card/03_048.png","expansion":35,"type":1,"level":4,"color":16,"term":1,"trait":0,"legacy":0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7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JSON.$A$1];[.$C278];[$JSON.$B$1];[.$E278];[$JSON.$C$1];[.$T278];[$JSON.$D$1];[.$G278];[$JSON.$E$1];[.$I278];[$JSON.$F$1];[.$L278];[$JSON.$G$1];[.$K278];[$JSON.$H$1];[.$O278];[$JSON.$I$1];[.$Q278];[$JSON.$J$1];[.$S278];[$JSON.$K$1];[.$A278];[$JSON.$L$1];[.$B278];[$JSON.$M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level&quot;:8,&quot;color&quot;:16,&quot;term&quot;:1,&quot;trait&quot;:0,&quot;legacy&quot;:0,&quot;orderTable&quot;:277,&quot;orderDeck&quot;:228}," calcext:value-type="string">
            <text:p>{"id":"3-49","name":"タウンゼント・ハリス","imageUrl":"https://one-draw.jp/ijinden/cardlist/003/card/03_049.png","expansion":35,"type":1,"level":8,"color":16,"term":1,"trait":0,"legacy":0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7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JSON.$A$1];[.$C279];[$JSON.$B$1];[.$E279];[$JSON.$C$1];[.$T279];[$JSON.$D$1];[.$G279];[$JSON.$E$1];[.$I279];[$JSON.$F$1];[.$L279];[$JSON.$G$1];[.$K279];[$JSON.$H$1];[.$O279];[$JSON.$I$1];[.$Q279];[$JSON.$J$1];[.$S279];[$JSON.$K$1];[.$A279];[$JSON.$L$1];[.$B279];[$JSON.$M$1])" office:value-type="string" office:string-value="{&quot;id&quot;:&quot;3-50&quot;,&quot;name&quot;:&quot;勝海舟&quot;,&quot;imageUrl&quot;:&quot;https://one-draw.jp/ijinden/cardlist/003/card/03_050.png&quot;,&quot;expansion&quot;:35,&quot;type&quot;:1,&quot;level&quot;:3,&quot;color&quot;:16,&quot;term&quot;:0,&quot;trait&quot;:0,&quot;legacy&quot;:1,&quot;orderTable&quot;:278,&quot;orderDeck&quot;:104}," calcext:value-type="string">
            <text:p>{"id":"3-50","name":"勝海舟","imageUrl":"https://one-draw.jp/ijinden/cardlist/003/card/03_050.png","expansion":35,"type":1,"level":3,"color":16,"term":0,"trait":0,"legacy":1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JSON.$A$1];[.$C280];[$JSON.$B$1];[.$E280];[$JSON.$C$1];[.$T280];[$JSON.$D$1];[.$G280];[$JSON.$E$1];[.$I280];[$JSON.$F$1];[.$L280];[$JSON.$G$1];[.$K280];[$JSON.$H$1];[.$O280];[$JSON.$I$1];[.$Q280];[$JSON.$J$1];[.$S280];[$JSON.$K$1];[.$A280];[$JSON.$L$1];[.$B280];[$JSON.$M$1])" office:value-type="string" office:string-value="{&quot;id&quot;:&quot;3-51&quot;,&quot;name&quot;:&quot;炎上がる天守閣&quot;,&quot;imageUrl&quot;:&quot;https://one-draw.jp/ijinden/cardlist/003/card/03_051.png&quot;,&quot;expansion&quot;:35,&quot;type&quot;:2,&quot;level&quot;:3,&quot;color&quot;:1,&quot;term&quot;:0,&quot;trait&quot;:0,&quot;legacy&quot;:0,&quot;orderTable&quot;:279,&quot;orderDeck&quot;:249}," calcext:value-type="string">
            <text:p>{"id":"3-51","name":"炎上がる天守閣","imageUrl":"https://one-draw.jp/ijinden/cardlist/003/card/03_051.png","expansion":35,"type":2,"level":3,"color":1,"term":0,"trait":0,"legacy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JSON.$A$1];[.$C281];[$JSON.$B$1];[.$E281];[$JSON.$C$1];[.$T281];[$JSON.$D$1];[.$G281];[$JSON.$E$1];[.$I281];[$JSON.$F$1];[.$L281];[$JSON.$G$1];[.$K281];[$JSON.$H$1];[.$O281];[$JSON.$I$1];[.$Q281];[$JSON.$J$1];[.$S281];[$JSON.$K$1];[.$A281];[$JSON.$L$1];[.$B281];[$JSON.$M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level&quot;:1,&quot;color&quot;:1,&quot;term&quot;:0,&quot;trait&quot;:0,&quot;legacy&quot;:0,&quot;orderTable&quot;:280,&quot;orderDeck&quot;:237}," calcext:value-type="string">
            <text:p>{"id":"3-52","name":"天下分け目の主戦場","imageUrl":"https://one-draw.jp/ijinden/cardlist/003/card/03_052.png","expansion":35,"type":2,"level":1,"color":1,"term":0,"trait":0,"legacy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JSON.$A$1];[.$C282];[$JSON.$B$1];[.$E282];[$JSON.$C$1];[.$T282];[$JSON.$D$1];[.$G282];[$JSON.$E$1];[.$I282];[$JSON.$F$1];[.$L282];[$JSON.$G$1];[.$K282];[$JSON.$H$1];[.$O282];[$JSON.$I$1];[.$Q282];[$JSON.$J$1];[.$S282];[$JSON.$K$1];[.$A282];[$JSON.$L$1];[.$B282];[$JSON.$M$1])" office:value-type="string" office:string-value="{&quot;id&quot;:&quot;3-53&quot;,&quot;name&quot;:&quot;永遠の帝都&quot;,&quot;imageUrl&quot;:&quot;https://one-draw.jp/ijinden/cardlist/003/card/03_053.png&quot;,&quot;expansion&quot;:35,&quot;type&quot;:2,&quot;level&quot;:4,&quot;color&quot;:2,&quot;term&quot;:0,&quot;trait&quot;:0,&quot;legacy&quot;:0,&quot;orderTable&quot;:281,&quot;orderDeck&quot;:262}," calcext:value-type="string">
            <text:p>{"id":"3-53","name":"永遠の帝都","imageUrl":"https://one-draw.jp/ijinden/cardlist/003/card/03_053.png","expansion":35,"type":2,"level":4,"color":2,"term":0,"trait":0,"legacy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83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JSON.$A$1];[.$C283];[$JSON.$B$1];[.$E283];[$JSON.$C$1];[.$T283];[$JSON.$D$1];[.$G283];[$JSON.$E$1];[.$I283];[$JSON.$F$1];[.$L283];[$JSON.$G$1];[.$K283];[$JSON.$H$1];[.$O283];[$JSON.$I$1];[.$Q283];[$JSON.$J$1];[.$S283];[$JSON.$K$1];[.$A283];[$JSON.$L$1];[.$B283];[$JSON.$M$1])" office:value-type="string" office:string-value="{&quot;id&quot;:&quot;3-54&quot;,&quot;name&quot;:&quot;暴風岬&quot;,&quot;imageUrl&quot;:&quot;https://one-draw.jp/ijinden/cardlist/003/card/03_054.png&quot;,&quot;expansion&quot;:35,&quot;type&quot;:2,&quot;level&quot;:5,&quot;color&quot;:2,&quot;term&quot;:0,&quot;trait&quot;:0,&quot;legacy&quot;:5,&quot;orderTable&quot;:282,&quot;orderDeck&quot;:268}," calcext:value-type="string">
            <text:p>{"id":"3-54","name":"暴風岬","imageUrl":"https://one-draw.jp/ijinden/cardlist/003/card/03_054.png","expansion":35,"type":2,"level":5,"color":2,"term":0,"trait":0,"legacy":5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JSON.$A$1];[.$C284];[$JSON.$B$1];[.$E284];[$JSON.$C$1];[.$T284];[$JSON.$D$1];[.$G284];[$JSON.$E$1];[.$I284];[$JSON.$F$1];[.$L284];[$JSON.$G$1];[.$K284];[$JSON.$H$1];[.$O284];[$JSON.$I$1];[.$Q284];[$JSON.$J$1];[.$S284];[$JSON.$K$1];[.$A284];[$JSON.$L$1];[.$B284];[$JSON.$M$1])" office:value-type="string" office:string-value="{&quot;id&quot;:&quot;3-55&quot;,&quot;name&quot;:&quot;商館並ぶ人工島&quot;,&quot;imageUrl&quot;:&quot;https://one-draw.jp/ijinden/cardlist/003/card/03_055.png&quot;,&quot;expansion&quot;:35,&quot;type&quot;:2,&quot;level&quot;:3,&quot;color&quot;:4,&quot;term&quot;:0,&quot;trait&quot;:0,&quot;legacy&quot;:0,&quot;orderTable&quot;:283,&quot;orderDeck&quot;:253}," calcext:value-type="string">
            <text:p>{"id":"3-55","name":"商館並ぶ人工島","imageUrl":"https://one-draw.jp/ijinden/cardlist/003/card/03_055.png","expansion":35,"type":2,"level":3,"color":4,"term":0,"trait":0,"legacy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85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285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JSON.$A$1];[.$C285];[$JSON.$B$1];[.$E285];[$JSON.$C$1];[.$T285];[$JSON.$D$1];[.$G285];[$JSON.$E$1];[.$I285];[$JSON.$F$1];[.$L285];[$JSON.$G$1];[.$K285];[$JSON.$H$1];[.$O285];[$JSON.$I$1];[.$Q285];[$JSON.$J$1];[.$S285];[$JSON.$K$1];[.$A285];[$JSON.$L$1];[.$B285];[$JSON.$M$1])" office:value-type="string" office:string-value="{&quot;id&quot;:&quot;3-56&quot;,&quot;name&quot;:&quot;志士の藩校&quot;,&quot;imageUrl&quot;:&quot;https://one-draw.jp/ijinden/cardlist/003/card/03_056.png&quot;,&quot;expansion&quot;:35,&quot;type&quot;:2,&quot;level&quot;:5,&quot;color&quot;:4,&quot;term&quot;:2,&quot;trait&quot;:0,&quot;legacy&quot;:8,&quot;orderTable&quot;:284,&quot;orderDeck&quot;:270}," calcext:value-type="string">
            <text:p>{"id":"3-56","name":"志士の藩校","imageUrl":"https://one-draw.jp/ijinden/cardlist/003/card/03_056.png","expansion":35,"type":2,"level":5,"color":4,"term":2,"trait":0,"legacy":8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86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86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JSON.$A$1];[.$C286];[$JSON.$B$1];[.$E286];[$JSON.$C$1];[.$T286];[$JSON.$D$1];[.$G286];[$JSON.$E$1];[.$I286];[$JSON.$F$1];[.$L286];[$JSON.$G$1];[.$K286];[$JSON.$H$1];[.$O286];[$JSON.$I$1];[.$Q286];[$JSON.$J$1];[.$S286];[$JSON.$K$1];[.$A286];[$JSON.$L$1];[.$B286];[$JSON.$M$1])" office:value-type="string" office:string-value="{&quot;id&quot;:&quot;3-57&quot;,&quot;name&quot;:&quot;風神雷神図&quot;,&quot;imageUrl&quot;:&quot;https://one-draw.jp/ijinden/cardlist/003/card/03_057.png&quot;,&quot;expansion&quot;:35,&quot;type&quot;:2,&quot;level&quot;:4,&quot;color&quot;:8,&quot;term&quot;:0,&quot;trait&quot;:2,&quot;legacy&quot;:7,&quot;orderTable&quot;:285,&quot;orderDeck&quot;:264}," calcext:value-type="string">
            <text:p>{"id":"3-57","name":"風神雷神図","imageUrl":"https://one-draw.jp/ijinden/cardlist/003/card/03_057.png","expansion":35,"type":2,"level":4,"color":8,"term":0,"trait":2,"legacy":7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287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JSON.$A$1];[.$C287];[$JSON.$B$1];[.$E287];[$JSON.$C$1];[.$T287];[$JSON.$D$1];[.$G287];[$JSON.$E$1];[.$I287];[$JSON.$F$1];[.$L287];[$JSON.$G$1];[.$K287];[$JSON.$H$1];[.$O287];[$JSON.$I$1];[.$Q287];[$JSON.$J$1];[.$S287];[$JSON.$K$1];[.$A287];[$JSON.$L$1];[.$B287];[$JSON.$M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level&quot;:3,&quot;color&quot;:8,&quot;term&quot;:0,&quot;trait&quot;:0,&quot;legacy&quot;:7,&quot;orderTable&quot;:286,&quot;orderDeck&quot;:257}," calcext:value-type="string">
            <text:p>{"id":"3-58","name":"茅葺き屋根の張出し舞台","imageUrl":"https://one-draw.jp/ijinden/cardlist/003/card/03_058.png","expansion":35,"type":2,"level":3,"color":8,"term":0,"trait":0,"legacy":7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JSON.$A$1];[.$C288];[$JSON.$B$1];[.$E288];[$JSON.$C$1];[.$T288];[$JSON.$D$1];[.$G288];[$JSON.$E$1];[.$I288];[$JSON.$F$1];[.$L288];[$JSON.$G$1];[.$K288];[$JSON.$H$1];[.$O288];[$JSON.$I$1];[.$Q288];[$JSON.$J$1];[.$S288];[$JSON.$K$1];[.$A288];[$JSON.$L$1];[.$B288];[$JSON.$M$1])" office:value-type="string" office:string-value="{&quot;id&quot;:&quot;3-59&quot;,&quot;name&quot;:&quot;森閑たる離宮&quot;,&quot;imageUrl&quot;:&quot;https://one-draw.jp/ijinden/cardlist/003/card/03_059.png&quot;,&quot;expansion&quot;:35,&quot;type&quot;:2,&quot;level&quot;:2,&quot;color&quot;:16,&quot;term&quot;:0,&quot;trait&quot;:0,&quot;legacy&quot;:0,&quot;orderTable&quot;:287,&quot;orderDeck&quot;:247}," calcext:value-type="string">
            <text:p>{"id":"3-59","name":"森閑たる離宮","imageUrl":"https://one-draw.jp/ijinden/cardlist/003/card/03_059.png","expansion":35,"type":2,"level":2,"color":16,"term":0,"trait":0,"legacy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28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JSON.$A$1];[.$C289];[$JSON.$B$1];[.$E289];[$JSON.$C$1];[.$T289];[$JSON.$D$1];[.$G289];[$JSON.$E$1];[.$I289];[$JSON.$F$1];[.$L289];[$JSON.$G$1];[.$K289];[$JSON.$H$1];[.$O289];[$JSON.$I$1];[.$Q289];[$JSON.$J$1];[.$S289];[$JSON.$K$1];[.$A289];[$JSON.$L$1];[.$B289];[$JSON.$M$1])" office:value-type="string" office:string-value="{&quot;id&quot;:&quot;3-60&quot;,&quot;name&quot;:&quot;黒船&quot;,&quot;imageUrl&quot;:&quot;https://one-draw.jp/ijinden/cardlist/003/card/03_060.png&quot;,&quot;expansion&quot;:35,&quot;type&quot;:2,&quot;level&quot;:6,&quot;color&quot;:16,&quot;term&quot;:0,&quot;trait&quot;:0,&quot;legacy&quot;:0,&quot;orderTable&quot;:288,&quot;orderDeck&quot;:278}," calcext:value-type="string">
            <text:p>{"id":"3-60","name":"黒船","imageUrl":"https://one-draw.jp/ijinden/cardlist/003/card/03_060.png","expansion":35,"type":2,"level":6,"color":16,"term":0,"trait":0,"legacy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JSON.$A$1];[.$C290];[$JSON.$B$1];[.$E290];[$JSON.$C$1];[.$T290];[$JSON.$D$1];[.$G290];[$JSON.$E$1];[.$I290];[$JSON.$F$1];[.$L290];[$JSON.$G$1];[.$K290];[$JSON.$H$1];[.$O290];[$JSON.$I$1];[.$Q290];[$JSON.$J$1];[.$S290];[$JSON.$K$1];[.$A290];[$JSON.$L$1];[.$B290];[$JSON.$M$1])" office:value-type="string" office:string-value="{&quot;id&quot;:&quot;3-61&quot;,&quot;name&quot;:&quot;サンダーボルト&quot;,&quot;imageUrl&quot;:&quot;https://one-draw.jp/ijinden/cardlist/003/card/03_061.png&quot;,&quot;expansion&quot;:35,&quot;type&quot;:3,&quot;level&quot;:6,&quot;color&quot;:1,&quot;term&quot;:0,&quot;trait&quot;:0,&quot;legacy&quot;:1,&quot;orderTable&quot;:289,&quot;orderDeck&quot;:333}," calcext:value-type="string">
            <text:p>{"id":"3-61","name":"サンダーボルト","imageUrl":"https://one-draw.jp/ijinden/cardlist/003/card/03_061.png","expansion":35,"type":3,"level":6,"color":1,"term":0,"trait":0,"legacy":1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JSON.$A$1];[.$C291];[$JSON.$B$1];[.$E291];[$JSON.$C$1];[.$T291];[$JSON.$D$1];[.$G291];[$JSON.$E$1];[.$I291];[$JSON.$F$1];[.$L291];[$JSON.$G$1];[.$K291];[$JSON.$H$1];[.$O291];[$JSON.$I$1];[.$Q291];[$JSON.$J$1];[.$S291];[$JSON.$K$1];[.$A291];[$JSON.$L$1];[.$B291];[$JSON.$M$1])" office:value-type="string" office:string-value="{&quot;id&quot;:&quot;3-62&quot;,&quot;name&quot;:&quot;パイロオーラ&quot;,&quot;imageUrl&quot;:&quot;https://one-draw.jp/ijinden/cardlist/003/card/03_062.png&quot;,&quot;expansion&quot;:35,&quot;type&quot;:3,&quot;level&quot;:2,&quot;color&quot;:1,&quot;term&quot;:0,&quot;trait&quot;:0,&quot;legacy&quot;:1,&quot;orderTable&quot;:290,&quot;orderDeck&quot;:293}," calcext:value-type="string">
            <text:p>{"id":"3-62","name":"パイロオーラ","imageUrl":"https://one-draw.jp/ijinden/cardlist/003/card/03_062.png","expansion":35,"type":3,"level":2,"color":1,"term":0,"trait":0,"legacy":1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29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JSON.$A$1];[.$C292];[$JSON.$B$1];[.$E292];[$JSON.$C$1];[.$T292];[$JSON.$D$1];[.$G292];[$JSON.$E$1];[.$I292];[$JSON.$F$1];[.$L292];[$JSON.$G$1];[.$K292];[$JSON.$H$1];[.$O292];[$JSON.$I$1];[.$Q292];[$JSON.$J$1];[.$S292];[$JSON.$K$1];[.$A292];[$JSON.$L$1];[.$B292];[$JSON.$M$1])" office:value-type="string" office:string-value="{&quot;id&quot;:&quot;3-63&quot;,&quot;name&quot;:&quot;アイオン&quot;,&quot;imageUrl&quot;:&quot;https://one-draw.jp/ijinden/cardlist/003/card/03_063.png&quot;,&quot;expansion&quot;:35,&quot;type&quot;:3,&quot;level&quot;:10,&quot;color&quot;:2,&quot;term&quot;:0,&quot;trait&quot;:0,&quot;legacy&quot;:5,&quot;orderTable&quot;:291,&quot;orderDeck&quot;:336}," calcext:value-type="string">
            <text:p>{"id":"3-63","name":"アイオン","imageUrl":"https://one-draw.jp/ijinden/cardlist/003/card/03_063.png","expansion":35,"type":3,"level":10,"color":2,"term":0,"trait":0,"legacy":5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JSON.$A$1];[.$C293];[$JSON.$B$1];[.$E293];[$JSON.$C$1];[.$T293];[$JSON.$D$1];[.$G293];[$JSON.$E$1];[.$I293];[$JSON.$F$1];[.$L293];[$JSON.$G$1];[.$K293];[$JSON.$H$1];[.$O293];[$JSON.$I$1];[.$Q293];[$JSON.$J$1];[.$S293];[$JSON.$K$1];[.$A293];[$JSON.$L$1];[.$B293];[$JSON.$M$1])" office:value-type="string" office:string-value="{&quot;id&quot;:&quot;3-64&quot;,&quot;name&quot;:&quot;ハイドロオーラ&quot;,&quot;imageUrl&quot;:&quot;https://one-draw.jp/ijinden/cardlist/003/card/03_064.png&quot;,&quot;expansion&quot;:35,&quot;type&quot;:3,&quot;level&quot;:2,&quot;color&quot;:2,&quot;term&quot;:0,&quot;trait&quot;:0,&quot;legacy&quot;:1,&quot;orderTable&quot;:292,&quot;orderDeck&quot;:297}," calcext:value-type="string">
            <text:p>{"id":"3-64","name":"ハイドロオーラ","imageUrl":"https://one-draw.jp/ijinden/cardlist/003/card/03_064.png","expansion":35,"type":3,"level":2,"color":2,"term":0,"trait":0,"legacy":1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JSON.$A$1];[.$C294];[$JSON.$B$1];[.$E294];[$JSON.$C$1];[.$T294];[$JSON.$D$1];[.$G294];[$JSON.$E$1];[.$I294];[$JSON.$F$1];[.$L294];[$JSON.$G$1];[.$K294];[$JSON.$H$1];[.$O294];[$JSON.$I$1];[.$Q294];[$JSON.$J$1];[.$S294];[$JSON.$K$1];[.$A294];[$JSON.$L$1];[.$B294];[$JSON.$M$1])" office:value-type="string" office:string-value="{&quot;id&quot;:&quot;3-65&quot;,&quot;name&quot;:&quot;ソーサリー&quot;,&quot;imageUrl&quot;:&quot;https://one-draw.jp/ijinden/cardlist/003/card/03_065.png&quot;,&quot;expansion&quot;:35,&quot;type&quot;:3,&quot;level&quot;:5,&quot;color&quot;:4,&quot;term&quot;:0,&quot;trait&quot;:0,&quot;legacy&quot;:2,&quot;orderTable&quot;:293,&quot;orderDeck&quot;:326}," calcext:value-type="string">
            <text:p>{"id":"3-65","name":"ソーサリー","imageUrl":"https://one-draw.jp/ijinden/cardlist/003/card/03_065.png","expansion":35,"type":3,"level":5,"color":4,"term":0,"trait":0,"legacy":2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JSON.$A$1];[.$C295];[$JSON.$B$1];[.$E295];[$JSON.$C$1];[.$T295];[$JSON.$D$1];[.$G295];[$JSON.$E$1];[.$I295];[$JSON.$F$1];[.$L295];[$JSON.$G$1];[.$K295];[$JSON.$H$1];[.$O295];[$JSON.$I$1];[.$Q295];[$JSON.$J$1];[.$S295];[$JSON.$K$1];[.$A295];[$JSON.$L$1];[.$B295];[$JSON.$M$1])" office:value-type="string" office:string-value="{&quot;id&quot;:&quot;3-66&quot;,&quot;name&quot;:&quot;クロロオーラ&quot;,&quot;imageUrl&quot;:&quot;https://one-draw.jp/ijinden/cardlist/003/card/03_066.png&quot;,&quot;expansion&quot;:35,&quot;type&quot;:3,&quot;level&quot;:2,&quot;color&quot;:4,&quot;term&quot;:0,&quot;trait&quot;:0,&quot;legacy&quot;:1,&quot;orderTable&quot;:294,&quot;orderDeck&quot;:298}," calcext:value-type="string">
            <text:p>{"id":"3-66","name":"クロロオーラ","imageUrl":"https://one-draw.jp/ijinden/cardlist/003/card/03_066.png","expansion":35,"type":3,"level":2,"color":4,"term":0,"trait":0,"legacy":1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JSON.$A$1];[.$C296];[$JSON.$B$1];[.$E296];[$JSON.$C$1];[.$T296];[$JSON.$D$1];[.$G296];[$JSON.$E$1];[.$I296];[$JSON.$F$1];[.$L296];[$JSON.$G$1];[.$K296];[$JSON.$H$1];[.$O296];[$JSON.$I$1];[.$Q296];[$JSON.$J$1];[.$S296];[$JSON.$K$1];[.$A296];[$JSON.$L$1];[.$B296];[$JSON.$M$1])" office:value-type="string" office:string-value="{&quot;id&quot;:&quot;3-67&quot;,&quot;name&quot;:&quot;パシフィック&quot;,&quot;imageUrl&quot;:&quot;https://one-draw.jp/ijinden/cardlist/003/card/03_067.png&quot;,&quot;expansion&quot;:35,&quot;type&quot;:3,&quot;level&quot;:2,&quot;color&quot;:8,&quot;term&quot;:0,&quot;trait&quot;:0,&quot;legacy&quot;:2,&quot;orderTable&quot;:295,&quot;orderDeck&quot;:299}," calcext:value-type="string">
            <text:p>{"id":"3-67","name":"パシフィック","imageUrl":"https://one-draw.jp/ijinden/cardlist/003/card/03_067.png","expansion":35,"type":3,"level":2,"color":8,"term":0,"trait":0,"legacy":2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JSON.$A$1];[.$C297];[$JSON.$B$1];[.$E297];[$JSON.$C$1];[.$T297];[$JSON.$D$1];[.$G297];[$JSON.$E$1];[.$I297];[$JSON.$F$1];[.$L297];[$JSON.$G$1];[.$K297];[$JSON.$H$1];[.$O297];[$JSON.$I$1];[.$Q297];[$JSON.$J$1];[.$S297];[$JSON.$K$1];[.$A297];[$JSON.$L$1];[.$B297];[$JSON.$M$1])" office:value-type="string" office:string-value="{&quot;id&quot;:&quot;3-68&quot;,&quot;name&quot;:&quot;ジオオーラ&quot;,&quot;imageUrl&quot;:&quot;https://one-draw.jp/ijinden/cardlist/003/card/03_068.png&quot;,&quot;expansion&quot;:35,&quot;type&quot;:3,&quot;level&quot;:2,&quot;color&quot;:8,&quot;term&quot;:0,&quot;trait&quot;:0,&quot;legacy&quot;:1,&quot;orderTable&quot;:296,&quot;orderDeck&quot;:301}," calcext:value-type="string">
            <text:p>{"id":"3-68","name":"ジオオーラ","imageUrl":"https://one-draw.jp/ijinden/cardlist/003/card/03_068.png","expansion":35,"type":3,"level":2,"color":8,"term":0,"trait":0,"legacy":1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298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JSON.$A$1];[.$C298];[$JSON.$B$1];[.$E298];[$JSON.$C$1];[.$T298];[$JSON.$D$1];[.$G298];[$JSON.$E$1];[.$I298];[$JSON.$F$1];[.$L298];[$JSON.$G$1];[.$K298];[$JSON.$H$1];[.$O298];[$JSON.$I$1];[.$Q298];[$JSON.$J$1];[.$S298];[$JSON.$K$1];[.$A298];[$JSON.$L$1];[.$B298];[$JSON.$M$1])" office:value-type="string" office:string-value="{&quot;id&quot;:&quot;3-69&quot;,&quot;name&quot;:&quot;コーザリティ&quot;,&quot;imageUrl&quot;:&quot;https://one-draw.jp/ijinden/cardlist/003/card/03_069.png&quot;,&quot;expansion&quot;:35,&quot;type&quot;:3,&quot;level&quot;:3,&quot;color&quot;:16,&quot;term&quot;:0,&quot;trait&quot;:0,&quot;legacy&quot;:2,&quot;orderTable&quot;:297,&quot;orderDeck&quot;:317}," calcext:value-type="string">
            <text:p>{"id":"3-69","name":"コーザリティ","imageUrl":"https://one-draw.jp/ijinden/cardlist/003/card/03_069.png","expansion":35,"type":3,"level":3,"color":16,"term":0,"trait":0,"legacy":2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29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JSON.$A$1];[.$C299];[$JSON.$B$1];[.$E299];[$JSON.$C$1];[.$T299];[$JSON.$D$1];[.$G299];[$JSON.$E$1];[.$I299];[$JSON.$F$1];[.$L299];[$JSON.$G$1];[.$K299];[$JSON.$H$1];[.$O299];[$JSON.$I$1];[.$Q299];[$JSON.$J$1];[.$S299];[$JSON.$K$1];[.$A299];[$JSON.$L$1];[.$B299];[$JSON.$M$1])" office:value-type="string" office:string-value="{&quot;id&quot;:&quot;3-70&quot;,&quot;name&quot;:&quot;エアロオーラ&quot;,&quot;imageUrl&quot;:&quot;https://one-draw.jp/ijinden/cardlist/003/card/03_070.png&quot;,&quot;expansion&quot;:35,&quot;type&quot;:3,&quot;level&quot;:2,&quot;color&quot;:16,&quot;term&quot;:0,&quot;trait&quot;:0,&quot;legacy&quot;:1,&quot;orderTable&quot;:298,&quot;orderDeck&quot;:302}," calcext:value-type="string">
            <text:p>{"id":"3-70","name":"エアロオーラ","imageUrl":"https://one-draw.jp/ijinden/cardlist/003/card/03_070.png","expansion":35,"type":3,"level":2,"color":16,"term":0,"trait":0,"legacy":1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0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JSON.$A$1];[.$C300];[$JSON.$B$1];[.$E300];[$JSON.$C$1];[.$T300];[$JSON.$D$1];[.$G300];[$JSON.$E$1];[.$I300];[$JSON.$F$1];[.$L300];[$JSON.$G$1];[.$K300];[$JSON.$H$1];[.$O300];[$JSON.$I$1];[.$Q300];[$JSON.$J$1];[.$S300];[$JSON.$K$1];[.$A300];[$JSON.$L$1];[.$B300];[$JSON.$M$1])" office:value-type="string" office:string-value="{&quot;id&quot;:&quot;3-71&quot;,&quot;name&quot;:&quot;喜びの種&quot;,&quot;imageUrl&quot;:&quot;https://one-draw.jp/ijinden/cardlist/003/card/03_071.png&quot;,&quot;expansion&quot;:35,&quot;type&quot;:4,&quot;level&quot;:1,&quot;color&quot;:1,&quot;term&quot;:0,&quot;trait&quot;:0,&quot;legacy&quot;:1,&quot;orderTable&quot;:299,&quot;orderDeck&quot;:347}," calcext:value-type="string">
            <text:p>{"id":"3-71","name":"喜びの種","imageUrl":"https://one-draw.jp/ijinden/cardlist/003/card/03_071.png","expansion":35,"type":4,"level":1,"color":1,"term":0,"trait":0,"legacy":1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JSON.$A$1];[.$C301];[$JSON.$B$1];[.$E301];[$JSON.$C$1];[.$T301];[$JSON.$D$1];[.$G301];[$JSON.$E$1];[.$I301];[$JSON.$F$1];[.$L301];[$JSON.$G$1];[.$K301];[$JSON.$H$1];[.$O301];[$JSON.$I$1];[.$Q301];[$JSON.$J$1];[.$S301];[$JSON.$K$1];[.$A301];[$JSON.$L$1];[.$B301];[$JSON.$M$1])" office:value-type="string" office:string-value="{&quot;id&quot;:&quot;3-72&quot;,&quot;name&quot;:&quot;怖れの種&quot;,&quot;imageUrl&quot;:&quot;https://one-draw.jp/ijinden/cardlist/003/card/03_072.png&quot;,&quot;expansion&quot;:35,&quot;type&quot;:4,&quot;level&quot;:1,&quot;color&quot;:2,&quot;term&quot;:0,&quot;trait&quot;:0,&quot;legacy&quot;:1,&quot;orderTable&quot;:300,&quot;orderDeck&quot;:353}," calcext:value-type="string">
            <text:p>{"id":"3-72","name":"怖れの種","imageUrl":"https://one-draw.jp/ijinden/cardlist/003/card/03_072.png","expansion":35,"type":4,"level":1,"color":2,"term":0,"trait":0,"legacy":1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2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JSON.$A$1];[.$C302];[$JSON.$B$1];[.$E302];[$JSON.$C$1];[.$T302];[$JSON.$D$1];[.$G302];[$JSON.$E$1];[.$I302];[$JSON.$F$1];[.$L302];[$JSON.$G$1];[.$K302];[$JSON.$H$1];[.$O302];[$JSON.$I$1];[.$Q302];[$JSON.$J$1];[.$S302];[$JSON.$K$1];[.$A302];[$JSON.$L$1];[.$B302];[$JSON.$M$1])" office:value-type="string" office:string-value="{&quot;id&quot;:&quot;3-73&quot;,&quot;name&quot;:&quot;怒りの種&quot;,&quot;imageUrl&quot;:&quot;https://one-draw.jp/ijinden/cardlist/003/card/03_073.png&quot;,&quot;expansion&quot;:35,&quot;type&quot;:4,&quot;level&quot;:1,&quot;color&quot;:4,&quot;term&quot;:0,&quot;trait&quot;:0,&quot;legacy&quot;:1,&quot;orderTable&quot;:301,&quot;orderDeck&quot;:359}," calcext:value-type="string">
            <text:p>{"id":"3-73","name":"怒りの種","imageUrl":"https://one-draw.jp/ijinden/cardlist/003/card/03_073.png","expansion":35,"type":4,"level":1,"color":4,"term":0,"trait":0,"legacy":1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3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JSON.$A$1];[.$C303];[$JSON.$B$1];[.$E303];[$JSON.$C$1];[.$T303];[$JSON.$D$1];[.$G303];[$JSON.$E$1];[.$I303];[$JSON.$F$1];[.$L303];[$JSON.$G$1];[.$K303];[$JSON.$H$1];[.$O303];[$JSON.$I$1];[.$Q303];[$JSON.$J$1];[.$S303];[$JSON.$K$1];[.$A303];[$JSON.$L$1];[.$B303];[$JSON.$M$1])" office:value-type="string" office:string-value="{&quot;id&quot;:&quot;3-74&quot;,&quot;name&quot;:&quot;苦しみの種&quot;,&quot;imageUrl&quot;:&quot;https://one-draw.jp/ijinden/cardlist/003/card/03_074.png&quot;,&quot;expansion&quot;:35,&quot;type&quot;:4,&quot;level&quot;:1,&quot;color&quot;:8,&quot;term&quot;:0,&quot;trait&quot;:0,&quot;legacy&quot;:1,&quot;orderTable&quot;:302,&quot;orderDeck&quot;:364}," calcext:value-type="string">
            <text:p>{"id":"3-74","name":"苦しみの種","imageUrl":"https://one-draw.jp/ijinden/cardlist/003/card/03_074.png","expansion":35,"type":4,"level":1,"color":8,"term":0,"trait":0,"legacy":1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JSON.$A$1];[.$C304];[$JSON.$B$1];[.$E304];[$JSON.$C$1];[.$T304];[$JSON.$D$1];[.$G304];[$JSON.$E$1];[.$I304];[$JSON.$F$1];[.$L304];[$JSON.$G$1];[.$K304];[$JSON.$H$1];[.$O304];[$JSON.$I$1];[.$Q304];[$JSON.$J$1];[.$S304];[$JSON.$K$1];[.$A304];[$JSON.$L$1];[.$B304];[$JSON.$M$1])" office:value-type="string" office:string-value="{&quot;id&quot;:&quot;3-75&quot;,&quot;name&quot;:&quot;悲しみの種&quot;,&quot;imageUrl&quot;:&quot;https://one-draw.jp/ijinden/cardlist/003/card/03_075.png&quot;,&quot;expansion&quot;:35,&quot;type&quot;:4,&quot;level&quot;:1,&quot;color&quot;:16,&quot;term&quot;:0,&quot;trait&quot;:0,&quot;legacy&quot;:1,&quot;orderTable&quot;:303,&quot;orderDeck&quot;:369}," calcext:value-type="string">
            <text:p>{"id":"3-75","name":"悲しみの種","imageUrl":"https://one-draw.jp/ijinden/cardlist/003/card/03_075.png","expansion":35,"type":4,"level":1,"color":16,"term":0,"trait":0,"legacy":1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05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JSON.$A$1];[.$C305];[$JSON.$B$1];[.$E305];[$JSON.$C$1];[.$T305];[$JSON.$D$1];[.$G305];[$JSON.$E$1];[.$I305];[$JSON.$F$1];[.$L305];[$JSON.$G$1];[.$K305];[$JSON.$H$1];[.$O305];[$JSON.$I$1];[.$Q305];[$JSON.$J$1];[.$S305];[$JSON.$K$1];[.$A305];[$JSON.$L$1];[.$B305];[$JSON.$M$1])" office:value-type="string" office:string-value="{&quot;id&quot;:&quot;3-76&quot;,&quot;name&quot;:&quot;ダンダラ羽織&quot;,&quot;imageUrl&quot;:&quot;https://one-draw.jp/ijinden/cardlist/003/card/03_076.png&quot;,&quot;expansion&quot;:35,&quot;type&quot;:4,&quot;level&quot;:1,&quot;color&quot;:16,&quot;term&quot;:0,&quot;trait&quot;:0,&quot;legacy&quot;:3,&quot;orderTable&quot;:304,&quot;orderDeck&quot;:370}," calcext:value-type="string">
            <text:p>{"id":"3-76","name":"ダンダラ羽織","imageUrl":"https://one-draw.jp/ijinden/cardlist/003/card/03_076.png","expansion":35,"type":4,"level":1,"color":16,"term":0,"trait":0,"legacy":3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06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JSON.$A$1];[.$C306];[$JSON.$B$1];[.$E306];[$JSON.$C$1];[.$T306];[$JSON.$D$1];[.$G306];[$JSON.$E$1];[.$I306];[$JSON.$F$1];[.$L306];[$JSON.$G$1];[.$K306];[$JSON.$H$1];[.$O306];[$JSON.$I$1];[.$Q306];[$JSON.$J$1];[.$S306];[$JSON.$K$1];[.$A306];[$JSON.$L$1];[.$B306];[$JSON.$M$1])" office:value-type="string" office:string-value="{&quot;id&quot;:&quot;3-77&quot;,&quot;name&quot;:&quot;遁甲盤&quot;,&quot;imageUrl&quot;:&quot;https://one-draw.jp/ijinden/cardlist/003/card/03_077.png&quot;,&quot;expansion&quot;:35,&quot;type&quot;:4,&quot;level&quot;:0,&quot;color&quot;:64,&quot;term&quot;:0,&quot;trait&quot;:0,&quot;legacy&quot;:5,&quot;orderTable&quot;:305,&quot;orderDeck&quot;:342}," calcext:value-type="string">
            <text:p>{"id":"3-77","name":"遁甲盤","imageUrl":"https://one-draw.jp/ijinden/cardlist/003/card/03_077.png","expansion":35,"type":4,"level":0,"color":64,"term":0,"trait":0,"legacy":5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7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07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JSON.$A$1];[.$C307];[$JSON.$B$1];[.$E307];[$JSON.$C$1];[.$T307];[$JSON.$D$1];[.$G307];[$JSON.$E$1];[.$I307];[$JSON.$F$1];[.$L307];[$JSON.$G$1];[.$K307];[$JSON.$H$1];[.$O307];[$JSON.$I$1];[.$Q307];[$JSON.$J$1];[.$S307];[$JSON.$K$1];[.$A307];[$JSON.$L$1];[.$B307];[$JSON.$M$1])" office:value-type="string" office:string-value="{&quot;id&quot;:&quot;3-78&quot;,&quot;name&quot;:&quot;ホムンクルス&quot;,&quot;imageUrl&quot;:&quot;https://one-draw.jp/ijinden/cardlist/003/card/03_078.png&quot;,&quot;expansion&quot;:35,&quot;type&quot;:4,&quot;level&quot;:1,&quot;color&quot;:64,&quot;term&quot;:0,&quot;trait&quot;:0,&quot;legacy&quot;:0,&quot;orderTable&quot;:306,&quot;orderDeck&quot;:375}," calcext:value-type="string">
            <text:p>{"id":"3-78","name":"ホムンクルス","imageUrl":"https://one-draw.jp/ijinden/cardlist/003/card/03_078.png","expansion":35,"type":4,"level":1,"color":64,"term":0,"trait":0,"legacy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08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JSON.$A$1];[.$C308];[$JSON.$B$1];[.$E308];[$JSON.$C$1];[.$T308];[$JSON.$D$1];[.$G308];[$JSON.$E$1];[.$I308];[$JSON.$F$1];[.$L308];[$JSON.$G$1];[.$K308];[$JSON.$H$1];[.$O308];[$JSON.$I$1];[.$Q308];[$JSON.$J$1];[.$S308];[$JSON.$K$1];[.$A308];[$JSON.$L$1];[.$B308];[$JSON.$M$1])" office:value-type="string" office:string-value="{&quot;id&quot;:&quot;3-79&quot;,&quot;name&quot;:&quot;ストーンマスク&quot;,&quot;imageUrl&quot;:&quot;https://one-draw.jp/ijinden/cardlist/003/card/03_079.png&quot;,&quot;expansion&quot;:35,&quot;type&quot;:4,&quot;level&quot;:1,&quot;color&quot;:64,&quot;term&quot;:0,&quot;trait&quot;:0,&quot;legacy&quot;:3,&quot;orderTable&quot;:307,&quot;orderDeck&quot;:376}," calcext:value-type="string">
            <text:p>{"id":"3-79","name":"ストーンマスク","imageUrl":"https://one-draw.jp/ijinden/cardlist/003/card/03_079.png","expansion":35,"type":4,"level":1,"color":64,"term":0,"trait":0,"legacy":3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0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JSON.$A$1];[.$C309];[$JSON.$B$1];[.$E309];[$JSON.$C$1];[.$T309];[$JSON.$D$1];[.$G309];[$JSON.$E$1];[.$I309];[$JSON.$F$1];[.$L309];[$JSON.$G$1];[.$K309];[$JSON.$H$1];[.$O309];[$JSON.$I$1];[.$Q309];[$JSON.$J$1];[.$S309];[$JSON.$K$1];[.$A309];[$JSON.$L$1];[.$B309];[$JSON.$M$1])" office:value-type="string" office:string-value="{&quot;id&quot;:&quot;3-80&quot;,&quot;name&quot;:&quot;オブシディアン&quot;,&quot;imageUrl&quot;:&quot;https://one-draw.jp/ijinden/cardlist/003/card/03_080.png&quot;,&quot;expansion&quot;:35,&quot;type&quot;:4,&quot;level&quot;:3,&quot;color&quot;:64,&quot;term&quot;:0,&quot;trait&quot;:0,&quot;legacy&quot;:1,&quot;orderTable&quot;:308,&quot;orderDeck&quot;:390}," calcext:value-type="string">
            <text:p>{"id":"3-80","name":"オブシディアン","imageUrl":"https://one-draw.jp/ijinden/cardlist/003/card/03_080.png","expansion":35,"type":4,"level":3,"color":64,"term":0,"trait":0,"legacy":1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0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0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JSON.$A$1];[.$C310];[$JSON.$B$1];[.$E310];[$JSON.$C$1];[.$T310];[$JSON.$D$1];[.$G310];[$JSON.$E$1];[.$I310];[$JSON.$F$1];[.$L310];[$JSON.$G$1];[.$K310];[$JSON.$H$1];[.$O310];[$JSON.$I$1];[.$Q310];[$JSON.$J$1];[.$S310];[$JSON.$K$1];[.$A310];[$JSON.$L$1];[.$B310];[$JSON.$M$1])" office:value-type="string" office:string-value="{&quot;id&quot;:&quot;4-01&quot;,&quot;name&quot;:&quot;西郷隆盛&quot;,&quot;imageUrl&quot;:&quot;https://one-draw.jp/ijinden/cardlist/004/card/04_001.png&quot;,&quot;expansion&quot;:45,&quot;type&quot;:1,&quot;level&quot;:6,&quot;color&quot;:1,&quot;term&quot;:0,&quot;trait&quot;:0,&quot;legacy&quot;:0,&quot;orderTable&quot;:310,&quot;orderDeck&quot;:184}," calcext:value-type="string">
            <text:p>{"id":"4-01","name":"西郷隆盛","imageUrl":"https://one-draw.jp/ijinden/cardlist/004/card/04_001.png","expansion":45,"type":1,"level":6,"color":1,"term":0,"trait":0,"legacy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1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JSON.$A$1];[.$C311];[$JSON.$B$1];[.$E311];[$JSON.$C$1];[.$T311];[$JSON.$D$1];[.$G311];[$JSON.$E$1];[.$I311];[$JSON.$F$1];[.$L311];[$JSON.$G$1];[.$K311];[$JSON.$H$1];[.$O311];[$JSON.$I$1];[.$Q311];[$JSON.$J$1];[.$S311];[$JSON.$K$1];[.$A311];[$JSON.$L$1];[.$B311];[$JSON.$M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level&quot;:3,&quot;color&quot;:1,&quot;term&quot;:0,&quot;trait&quot;:0,&quot;legacy&quot;:1,&quot;orderTable&quot;:311,&quot;orderDeck&quot;:73}," calcext:value-type="string">
            <text:p>{"id":"4-02","name":"リチャード・アークライト","imageUrl":"https://one-draw.jp/ijinden/cardlist/004/card/04_002.png","expansion":45,"type":1,"level":3,"color":1,"term":0,"trait":0,"legacy":1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JSON.$A$1];[.$C312];[$JSON.$B$1];[.$E312];[$JSON.$C$1];[.$T312];[$JSON.$D$1];[.$G312];[$JSON.$E$1];[.$I312];[$JSON.$F$1];[.$L312];[$JSON.$G$1];[.$K312];[$JSON.$H$1];[.$O312];[$JSON.$I$1];[.$Q312];[$JSON.$J$1];[.$S312];[$JSON.$K$1];[.$A312];[$JSON.$L$1];[.$B312];[$JSON.$M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level&quot;:4,&quot;color&quot;:2,&quot;term&quot;:0,&quot;trait&quot;:0,&quot;legacy&quot;:4,&quot;orderTable&quot;:312,&quot;orderDeck&quot;:122}," calcext:value-type="string">
            <text:p>{"id":"4-03","name":"アンナ・パブロワ","imageUrl":"https://one-draw.jp/ijinden/cardlist/004/card/04_003.png","expansion":45,"type":1,"level":4,"color":2,"term":0,"trait":0,"legacy":4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JSON.$A$1];[.$C313];[$JSON.$B$1];[.$E313];[$JSON.$C$1];[.$T313];[$JSON.$D$1];[.$G313];[$JSON.$E$1];[.$I313];[$JSON.$F$1];[.$L313];[$JSON.$G$1];[.$K313];[$JSON.$H$1];[.$O313];[$JSON.$I$1];[.$Q313];[$JSON.$J$1];[.$S313];[$JSON.$K$1];[.$A313];[$JSON.$L$1];[.$B313];[$JSON.$M$1])" office:value-type="string" office:string-value="{&quot;id&quot;:&quot;4-04&quot;,&quot;name&quot;:&quot;ルイ14世&quot;,&quot;imageUrl&quot;:&quot;https://one-draw.jp/ijinden/cardlist/004/card/04_004.png&quot;,&quot;expansion&quot;:45,&quot;type&quot;:1,&quot;level&quot;:7,&quot;color&quot;:2,&quot;term&quot;:0,&quot;trait&quot;:0,&quot;legacy&quot;:0,&quot;orderTable&quot;:313,&quot;orderDeck&quot;:207}," calcext:value-type="string">
            <text:p>{"id":"4-04","name":"ルイ14世","imageUrl":"https://one-draw.jp/ijinden/cardlist/004/card/04_004.png","expansion":45,"type":1,"level":7,"color":2,"term":0,"trait":0,"legacy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1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JSON.$A$1];[.$C314];[$JSON.$B$1];[.$E314];[$JSON.$C$1];[.$T314];[$JSON.$D$1];[.$G314];[$JSON.$E$1];[.$I314];[$JSON.$F$1];[.$L314];[$JSON.$G$1];[.$K314];[$JSON.$H$1];[.$O314];[$JSON.$I$1];[.$Q314];[$JSON.$J$1];[.$S314];[$JSON.$K$1];[.$A314];[$JSON.$L$1];[.$B314];[$JSON.$M$1])" office:value-type="string" office:string-value="{&quot;id&quot;:&quot;4-05&quot;,&quot;name&quot;:&quot;藤原不比等&quot;,&quot;imageUrl&quot;:&quot;https://one-draw.jp/ijinden/cardlist/004/card/04_005.png&quot;,&quot;expansion&quot;:45,&quot;type&quot;:1,&quot;level&quot;:2,&quot;color&quot;:4,&quot;term&quot;:0,&quot;trait&quot;:0,&quot;legacy&quot;:6,&quot;orderTable&quot;:314,&quot;orderDeck&quot;:50}," calcext:value-type="string">
            <text:p>{"id":"4-05","name":"藤原不比等","imageUrl":"https://one-draw.jp/ijinden/cardlist/004/card/04_005.png","expansion":45,"type":1,"level":2,"color":4,"term":0,"trait":0,"legacy":6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1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JSON.$A$1];[.$C315];[$JSON.$B$1];[.$E315];[$JSON.$C$1];[.$T315];[$JSON.$D$1];[.$G315];[$JSON.$E$1];[.$I315];[$JSON.$F$1];[.$L315];[$JSON.$G$1];[.$K315];[$JSON.$H$1];[.$O315];[$JSON.$I$1];[.$Q315];[$JSON.$J$1];[.$S315];[$JSON.$K$1];[.$A315];[$JSON.$L$1];[.$B315];[$JSON.$M$1])" office:value-type="string" office:string-value="{&quot;id&quot;:&quot;4-06&quot;,&quot;name&quot;:&quot;伊能忠敬&quot;,&quot;imageUrl&quot;:&quot;https://one-draw.jp/ijinden/cardlist/004/card/04_006.png&quot;,&quot;expansion&quot;:45,&quot;type&quot;:1,&quot;level&quot;:4,&quot;color&quot;:4,&quot;term&quot;:0,&quot;trait&quot;:0,&quot;legacy&quot;:4,&quot;orderTable&quot;:315,&quot;orderDeck&quot;:130}," calcext:value-type="string">
            <text:p>{"id":"4-06","name":"伊能忠敬","imageUrl":"https://one-draw.jp/ijinden/cardlist/004/card/04_006.png","expansion":45,"type":1,"level":4,"color":4,"term":0,"trait":0,"legacy":4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6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JSON.$A$1];[.$C316];[$JSON.$B$1];[.$E316];[$JSON.$C$1];[.$T316];[$JSON.$D$1];[.$G316];[$JSON.$E$1];[.$I316];[$JSON.$F$1];[.$L316];[$JSON.$G$1];[.$K316];[$JSON.$H$1];[.$O316];[$JSON.$I$1];[.$Q316];[$JSON.$J$1];[.$S316];[$JSON.$K$1];[.$A316];[$JSON.$L$1];[.$B316];[$JSON.$M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level&quot;:4,&quot;color&quot;:8,&quot;term&quot;:0,&quot;trait&quot;:0,&quot;legacy&quot;:1,&quot;orderTable&quot;:316,&quot;orderDeck&quot;:137}," calcext:value-type="string">
            <text:p>{"id":"4-07","name":"アリエノール・ダキテーヌ","imageUrl":"https://one-draw.jp/ijinden/cardlist/004/card/04_007.png","expansion":45,"type":1,"level":4,"color":8,"term":0,"trait":0,"legacy":1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17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JSON.$A$1];[.$C317];[$JSON.$B$1];[.$E317];[$JSON.$C$1];[.$T317];[$JSON.$D$1];[.$G317];[$JSON.$E$1];[.$I317];[$JSON.$F$1];[.$L317];[$JSON.$G$1];[.$K317];[$JSON.$H$1];[.$O317];[$JSON.$I$1];[.$Q317];[$JSON.$J$1];[.$S317];[$JSON.$K$1];[.$A317];[$JSON.$L$1];[.$B317];[$JSON.$M$1])" office:value-type="string" office:string-value="{&quot;id&quot;:&quot;4-08&quot;,&quot;name&quot;:&quot;アルキメデス&quot;,&quot;imageUrl&quot;:&quot;https://one-draw.jp/ijinden/cardlist/004/card/04_008.png&quot;,&quot;expansion&quot;:45,&quot;type&quot;:1,&quot;level&quot;:7,&quot;color&quot;:8,&quot;term&quot;:0,&quot;trait&quot;:0,&quot;legacy&quot;:1,&quot;orderTable&quot;:317,&quot;orderDeck&quot;:217}," calcext:value-type="string">
            <text:p>{"id":"4-08","name":"アルキメデス","imageUrl":"https://one-draw.jp/ijinden/cardlist/004/card/04_008.png","expansion":45,"type":1,"level":7,"color":8,"term":0,"trait":0,"legacy":1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JSON.$A$1];[.$C318];[$JSON.$B$1];[.$E318];[$JSON.$C$1];[.$T318];[$JSON.$D$1];[.$G318];[$JSON.$E$1];[.$I318];[$JSON.$F$1];[.$L318];[$JSON.$G$1];[.$K318];[$JSON.$H$1];[.$O318];[$JSON.$I$1];[.$Q318];[$JSON.$J$1];[.$S318];[$JSON.$K$1];[.$A318];[$JSON.$L$1];[.$B318];[$JSON.$M$1])" office:value-type="string" office:string-value="{&quot;id&quot;:&quot;4-09&quot;,&quot;name&quot;:&quot;レオニダス&quot;,&quot;imageUrl&quot;:&quot;https://one-draw.jp/ijinden/cardlist/004/card/04_009.png&quot;,&quot;expansion&quot;:45,&quot;type&quot;:1,&quot;level&quot;:5,&quot;color&quot;:16,&quot;term&quot;:0,&quot;trait&quot;:0,&quot;legacy&quot;:0,&quot;orderTable&quot;:318,&quot;orderDeck&quot;:178}," calcext:value-type="string">
            <text:p>{"id":"4-09","name":"レオニダス","imageUrl":"https://one-draw.jp/ijinden/cardlist/004/card/04_009.png","expansion":45,"type":1,"level":5,"color":16,"term":0,"trait":0,"legacy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1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JSON.$A$1];[.$C319];[$JSON.$B$1];[.$E319];[$JSON.$C$1];[.$T319];[$JSON.$D$1];[.$G319];[$JSON.$E$1];[.$I319];[$JSON.$F$1];[.$L319];[$JSON.$G$1];[.$K319];[$JSON.$H$1];[.$O319];[$JSON.$I$1];[.$Q319];[$JSON.$J$1];[.$S319];[$JSON.$K$1];[.$A319];[$JSON.$L$1];[.$B319];[$JSON.$M$1])" office:value-type="string" office:string-value="{&quot;id&quot;:&quot;4-10&quot;,&quot;name&quot;:&quot;カール大帝&quot;,&quot;imageUrl&quot;:&quot;https://one-draw.jp/ijinden/cardlist/004/card/04_010.png&quot;,&quot;expansion&quot;:45,&quot;type&quot;:1,&quot;level&quot;:10,&quot;color&quot;:16,&quot;term&quot;:0,&quot;trait&quot;:0,&quot;legacy&quot;:0,&quot;orderTable&quot;:319,&quot;orderDeck&quot;:235}," calcext:value-type="string">
            <text:p>{"id":"4-10","name":"カール大帝","imageUrl":"https://one-draw.jp/ijinden/cardlist/004/card/04_010.png","expansion":45,"type":1,"level":10,"color":16,"term":0,"trait":0,"legacy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JSON.$A$1];[.$C320];[$JSON.$B$1];[.$E320];[$JSON.$C$1];[.$T320];[$JSON.$D$1];[.$G320];[$JSON.$E$1];[.$I320];[$JSON.$F$1];[.$L320];[$JSON.$G$1];[.$K320];[$JSON.$H$1];[.$O320];[$JSON.$I$1];[.$Q320];[$JSON.$J$1];[.$S320];[$JSON.$K$1];[.$A320];[$JSON.$L$1];[.$B320];[$JSON.$M$1])" office:value-type="string" office:string-value="{&quot;id&quot;:&quot;4-11&quot;,&quot;name&quot;:&quot;島津斉彬&quot;,&quot;imageUrl&quot;:&quot;https://one-draw.jp/ijinden/cardlist/004/card/04_011.png&quot;,&quot;expansion&quot;:45,&quot;type&quot;:1,&quot;level&quot;:4,&quot;color&quot;:1,&quot;term&quot;:0,&quot;trait&quot;:0,&quot;legacy&quot;:4,&quot;orderTable&quot;:320,&quot;orderDeck&quot;:113}," calcext:value-type="string">
            <text:p>{"id":"4-11","name":"島津斉彬","imageUrl":"https://one-draw.jp/ijinden/cardlist/004/card/04_011.png","expansion":45,"type":1,"level":4,"color":1,"term":0,"trait":0,"legacy":4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JSON.$A$1];[.$C321];[$JSON.$B$1];[.$E321];[$JSON.$C$1];[.$T321];[$JSON.$D$1];[.$G321];[$JSON.$E$1];[.$I321];[$JSON.$F$1];[.$L321];[$JSON.$G$1];[.$K321];[$JSON.$H$1];[.$O321];[$JSON.$I$1];[.$Q321];[$JSON.$J$1];[.$S321];[$JSON.$K$1];[.$A321];[$JSON.$L$1];[.$B321];[$JSON.$M$1])" office:value-type="string" office:string-value="{&quot;id&quot;:&quot;4-12&quot;,&quot;name&quot;:&quot;島津久光&quot;,&quot;imageUrl&quot;:&quot;https://one-draw.jp/ijinden/cardlist/004/card/04_012.png&quot;,&quot;expansion&quot;:45,&quot;type&quot;:1,&quot;level&quot;:2,&quot;color&quot;:1,&quot;term&quot;:0,&quot;trait&quot;:0,&quot;legacy&quot;:4,&quot;orderTable&quot;:321,&quot;orderDeck&quot;:30}," calcext:value-type="string">
            <text:p>{"id":"4-12","name":"島津久光","imageUrl":"https://one-draw.jp/ijinden/cardlist/004/card/04_012.png","expansion":45,"type":1,"level":2,"color":1,"term":0,"trait":0,"legacy":4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JSON.$A$1];[.$C322];[$JSON.$B$1];[.$E322];[$JSON.$C$1];[.$T322];[$JSON.$D$1];[.$G322];[$JSON.$E$1];[.$I322];[$JSON.$F$1];[.$L322];[$JSON.$G$1];[.$K322];[$JSON.$H$1];[.$O322];[$JSON.$I$1];[.$Q322];[$JSON.$J$1];[.$S322];[$JSON.$K$1];[.$A322];[$JSON.$L$1];[.$B322];[$JSON.$M$1])" office:value-type="string" office:string-value="{&quot;id&quot;:&quot;4-13&quot;,&quot;name&quot;:&quot;大久保利通&quot;,&quot;imageUrl&quot;:&quot;https://one-draw.jp/ijinden/cardlist/004/card/04_013.png&quot;,&quot;expansion&quot;:45,&quot;type&quot;:1,&quot;level&quot;:5,&quot;color&quot;:1,&quot;term&quot;:0,&quot;trait&quot;:0,&quot;legacy&quot;:0,&quot;orderTable&quot;:322,&quot;orderDeck&quot;:152}," calcext:value-type="string">
            <text:p>{"id":"4-13","name":"大久保利通","imageUrl":"https://one-draw.jp/ijinden/cardlist/004/card/04_013.png","expansion":45,"type":1,"level":5,"color":1,"term":0,"trait":0,"legacy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3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JSON.$A$1];[.$C323];[$JSON.$B$1];[.$E323];[$JSON.$C$1];[.$T323];[$JSON.$D$1];[.$G323];[$JSON.$E$1];[.$I323];[$JSON.$F$1];[.$L323];[$JSON.$G$1];[.$K323];[$JSON.$H$1];[.$O323];[$JSON.$I$1];[.$Q323];[$JSON.$J$1];[.$S323];[$JSON.$K$1];[.$A323];[$JSON.$L$1];[.$B323];[$JSON.$M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level&quot;:5,&quot;color&quot;:1,&quot;term&quot;:0,&quot;trait&quot;:0,&quot;legacy&quot;:0,&quot;orderTable&quot;:323,&quot;orderDeck&quot;:153}," calcext:value-type="string">
            <text:p>{"id":"4-14","name":"ジェームズ・ハーグリーブズ","imageUrl":"https://one-draw.jp/ijinden/cardlist/004/card/04_014.png","expansion":45,"type":1,"level":5,"color":1,"term":0,"trait":0,"legacy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24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JSON.$A$1];[.$C324];[$JSON.$B$1];[.$E324];[$JSON.$C$1];[.$T324];[$JSON.$D$1];[.$G324];[$JSON.$E$1];[.$I324];[$JSON.$F$1];[.$L324];[$JSON.$G$1];[.$K324];[$JSON.$H$1];[.$O324];[$JSON.$I$1];[.$Q324];[$JSON.$J$1];[.$S324];[$JSON.$K$1];[.$A324];[$JSON.$L$1];[.$B324];[$JSON.$M$1])" office:value-type="string" office:string-value="{&quot;id&quot;:&quot;4-15&quot;,&quot;name&quot;:&quot;ねね&quot;,&quot;imageUrl&quot;:&quot;https://one-draw.jp/ijinden/cardlist/004/card/04_015.png&quot;,&quot;expansion&quot;:45,&quot;type&quot;:1,&quot;level&quot;:2,&quot;color&quot;:1,&quot;term&quot;:0,&quot;trait&quot;:0,&quot;legacy&quot;:6,&quot;orderTable&quot;:324,&quot;orderDeck&quot;:31}," calcext:value-type="string">
            <text:p>{"id":"4-15","name":"ねね","imageUrl":"https://one-draw.jp/ijinden/cardlist/004/card/04_015.png","expansion":45,"type":1,"level":2,"color":1,"term":0,"trait":0,"legacy":6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2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JSON.$A$1];[.$C325];[$JSON.$B$1];[.$E325];[$JSON.$C$1];[.$T325];[$JSON.$D$1];[.$G325];[$JSON.$E$1];[.$I325];[$JSON.$F$1];[.$L325];[$JSON.$G$1];[.$K325];[$JSON.$H$1];[.$O325];[$JSON.$I$1];[.$Q325];[$JSON.$J$1];[.$S325];[$JSON.$K$1];[.$A325];[$JSON.$L$1];[.$B325];[$JSON.$M$1])" office:value-type="string" office:string-value="{&quot;id&quot;:&quot;4-16&quot;,&quot;name&quot;:&quot;源為朝&quot;,&quot;imageUrl&quot;:&quot;https://one-draw.jp/ijinden/cardlist/004/card/04_016.png&quot;,&quot;expansion&quot;:45,&quot;type&quot;:1,&quot;level&quot;:6,&quot;color&quot;:1,&quot;term&quot;:0,&quot;trait&quot;:0,&quot;legacy&quot;:0,&quot;orderTable&quot;:325,&quot;orderDeck&quot;:185}," calcext:value-type="string">
            <text:p>{"id":"4-16","name":"源為朝","imageUrl":"https://one-draw.jp/ijinden/cardlist/004/card/04_016.png","expansion":45,"type":1,"level":6,"color":1,"term":0,"trait":0,"legacy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326];[$特性番号.$A$1:$特性番号.$B$8];2;0);0)" office:value-type="float" office:value="8" calcext:value-type="float">
            <text:p>8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26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JSON.$A$1];[.$C326];[$JSON.$B$1];[.$E326];[$JSON.$C$1];[.$T326];[$JSON.$D$1];[.$G326];[$JSON.$E$1];[.$I326];[$JSON.$F$1];[.$L326];[$JSON.$G$1];[.$K326];[$JSON.$H$1];[.$O326];[$JSON.$I$1];[.$Q326];[$JSON.$J$1];[.$S326];[$JSON.$K$1];[.$A326];[$JSON.$L$1];[.$B326];[$JSON.$M$1])" office:value-type="string" office:string-value="{&quot;id&quot;:&quot;4-17&quot;,&quot;name&quot;:&quot;久坂玄瑞&quot;,&quot;imageUrl&quot;:&quot;https://one-draw.jp/ijinden/cardlist/004/card/04_017.png&quot;,&quot;expansion&quot;:45,&quot;type&quot;:1,&quot;level&quot;:3,&quot;color&quot;:2,&quot;term&quot;:0,&quot;trait&quot;:8,&quot;legacy&quot;:9,&quot;orderTable&quot;:326,&quot;orderDeck&quot;:82}," calcext:value-type="string">
            <text:p>{"id":"4-17","name":"久坂玄瑞","imageUrl":"https://one-draw.jp/ijinden/cardlist/004/card/04_017.png","expansion":45,"type":1,"level":3,"color":2,"term":0,"trait":8,"legacy":9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327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JSON.$A$1];[.$C327];[$JSON.$B$1];[.$E327];[$JSON.$C$1];[.$T327];[$JSON.$D$1];[.$G327];[$JSON.$E$1];[.$I327];[$JSON.$F$1];[.$L327];[$JSON.$G$1];[.$K327];[$JSON.$H$1];[.$O327];[$JSON.$I$1];[.$Q327];[$JSON.$J$1];[.$S327];[$JSON.$K$1];[.$A327];[$JSON.$L$1];[.$B327];[$JSON.$M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level&quot;:5,&quot;color&quot;:2,&quot;term&quot;:0,&quot;trait&quot;:0,&quot;legacy&quot;:8,&quot;orderTable&quot;:327,&quot;orderDeck&quot;:162}," calcext:value-type="string">
            <text:p>{"id":"4-18","name":"ポンパドゥール夫人","imageUrl":"https://one-draw.jp/ijinden/cardlist/004/card/04_018.png","expansion":45,"type":1,"level":5,"color":2,"term":0,"trait":0,"legacy":8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8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JSON.$A$1];[.$C328];[$JSON.$B$1];[.$E328];[$JSON.$C$1];[.$T328];[$JSON.$D$1];[.$G328];[$JSON.$E$1];[.$I328];[$JSON.$F$1];[.$L328];[$JSON.$G$1];[.$K328];[$JSON.$H$1];[.$O328];[$JSON.$I$1];[.$Q328];[$JSON.$J$1];[.$S328];[$JSON.$K$1];[.$A328];[$JSON.$L$1];[.$B328];[$JSON.$M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level&quot;:2,&quot;color&quot;:2,&quot;term&quot;:0,&quot;trait&quot;:0,&quot;legacy&quot;:4,&quot;orderTable&quot;:328,&quot;orderDeck&quot;:42}," calcext:value-type="string">
            <text:p>{"id":"4-19","name":"エドモンド・カートライト","imageUrl":"https://one-draw.jp/ijinden/cardlist/004/card/04_019.png","expansion":45,"type":1,"level":2,"color":2,"term":0,"trait":0,"legacy":4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29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2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JSON.$A$1];[.$C329];[$JSON.$B$1];[.$E329];[$JSON.$C$1];[.$T329];[$JSON.$D$1];[.$G329];[$JSON.$E$1];[.$I329];[$JSON.$F$1];[.$L329];[$JSON.$G$1];[.$K329];[$JSON.$H$1];[.$O329];[$JSON.$I$1];[.$Q329];[$JSON.$J$1];[.$S329];[$JSON.$K$1];[.$A329];[$JSON.$L$1];[.$B329];[$JSON.$M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level&quot;:2,&quot;color&quot;:2,&quot;term&quot;:0,&quot;trait&quot;:4,&quot;legacy&quot;:4,&quot;orderTable&quot;:329,&quot;orderDeck&quot;:43}," calcext:value-type="string">
            <text:p>{"id":"4-20","name":"クロード・アシル・ドビュッシー","imageUrl":"https://one-draw.jp/ijinden/cardlist/004/card/04_020.png","expansion":45,"type":1,"level":2,"color":2,"term":0,"trait":4,"legacy":4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0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JSON.$A$1];[.$C330];[$JSON.$B$1];[.$E330];[$JSON.$C$1];[.$T330];[$JSON.$D$1];[.$G330];[$JSON.$E$1];[.$I330];[$JSON.$F$1];[.$L330];[$JSON.$G$1];[.$K330];[$JSON.$H$1];[.$O330];[$JSON.$I$1];[.$Q330];[$JSON.$J$1];[.$S330];[$JSON.$K$1];[.$A330];[$JSON.$L$1];[.$B330];[$JSON.$M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level&quot;:1,&quot;color&quot;:2,&quot;term&quot;:0,&quot;trait&quot;:4,&quot;legacy&quot;:4,&quot;orderTable&quot;:330,&quot;orderDeck&quot;:11}," calcext:value-type="string">
            <text:p>{"id":"4-21","name":"フレデリック・フランソワ・ショパン","imageUrl":"https://one-draw.jp/ijinden/cardlist/004/card/04_021.png","expansion":45,"type":1,"level":1,"color":2,"term":0,"trait":4,"legacy":4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1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JSON.$A$1];[.$C331];[$JSON.$B$1];[.$E331];[$JSON.$C$1];[.$T331];[$JSON.$D$1];[.$G331];[$JSON.$E$1];[.$I331];[$JSON.$F$1];[.$L331];[$JSON.$G$1];[.$K331];[$JSON.$H$1];[.$O331];[$JSON.$I$1];[.$Q331];[$JSON.$J$1];[.$S331];[$JSON.$K$1];[.$A331];[$JSON.$L$1];[.$B331];[$JSON.$M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level&quot;:3,&quot;color&quot;:2,&quot;term&quot;:0,&quot;trait&quot;:4,&quot;legacy&quot;:4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level":3,"color":2,"term":0,"trait":4,"legacy":4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2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32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JSON.$A$1];[.$C332];[$JSON.$B$1];[.$E332];[$JSON.$C$1];[.$T332];[$JSON.$D$1];[.$G332];[$JSON.$E$1];[.$I332];[$JSON.$F$1];[.$L332];[$JSON.$G$1];[.$K332];[$JSON.$H$1];[.$O332];[$JSON.$I$1];[.$Q332];[$JSON.$J$1];[.$S332];[$JSON.$K$1];[.$A332];[$JSON.$L$1];[.$B332];[$JSON.$M$1])" office:value-type="string" office:string-value="{&quot;id&quot;:&quot;4-23&quot;,&quot;name&quot;:&quot;岩倉具視&quot;,&quot;imageUrl&quot;:&quot;https://one-draw.jp/ijinden/cardlist/004/card/04_023.png&quot;,&quot;expansion&quot;:45,&quot;type&quot;:1,&quot;level&quot;:7,&quot;color&quot;:4,&quot;term&quot;:1,&quot;trait&quot;:0,&quot;legacy&quot;:0,&quot;orderTable&quot;:332,&quot;orderDeck&quot;:212}," calcext:value-type="string">
            <text:p>{"id":"4-23","name":"岩倉具視","imageUrl":"https://one-draw.jp/ijinden/cardlist/004/card/04_023.png","expansion":45,"type":1,"level":7,"color":4,"term":1,"trait":0,"legacy":0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3];[$特性番号.$A$1:$特性番号.$B$8];2;0);0)" office:value-type="float" office:value="4" calcext:value-type="float">
            <text:p>4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JSON.$A$1];[.$C333];[$JSON.$B$1];[.$E333];[$JSON.$C$1];[.$T333];[$JSON.$D$1];[.$G333];[$JSON.$E$1];[.$I333];[$JSON.$F$1];[.$L333];[$JSON.$G$1];[.$K333];[$JSON.$H$1];[.$O333];[$JSON.$I$1];[.$Q333];[$JSON.$J$1];[.$S333];[$JSON.$K$1];[.$A333];[$JSON.$L$1];[.$B333];[$JSON.$M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level&quot;:3,&quot;color&quot;:4,&quot;term&quot;:0,&quot;trait&quot;:4,&quot;legacy&quot;:4,&quot;orderTable&quot;:333,&quot;orderDeck&quot;:92}," calcext:value-type="string">
            <text:p>{"id":"4-24","name":"クララ・ヨゼフィーネ・シューマン","imageUrl":"https://one-draw.jp/ijinden/cardlist/004/card/04_024.png","expansion":45,"type":1,"level":3,"color":4,"term":0,"trait":4,"legacy":4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3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JSON.$A$1];[.$C334];[$JSON.$B$1];[.$E334];[$JSON.$C$1];[.$T334];[$JSON.$D$1];[.$G334];[$JSON.$E$1];[.$I334];[$JSON.$F$1];[.$L334];[$JSON.$G$1];[.$K334];[$JSON.$H$1];[.$O334];[$JSON.$I$1];[.$Q334];[$JSON.$J$1];[.$S334];[$JSON.$K$1];[.$A334];[$JSON.$L$1];[.$B334];[$JSON.$M$1])" office:value-type="string" office:string-value="{&quot;id&quot;:&quot;4-25&quot;,&quot;name&quot;:&quot;間宮林蔵&quot;,&quot;imageUrl&quot;:&quot;https://one-draw.jp/ijinden/cardlist/004/card/04_025.png&quot;,&quot;expansion&quot;:45,&quot;type&quot;:1,&quot;level&quot;:5,&quot;color&quot;:4,&quot;term&quot;:0,&quot;trait&quot;:0,&quot;legacy&quot;:0,&quot;orderTable&quot;:334,&quot;orderDeck&quot;:170}," calcext:value-type="string">
            <text:p>{"id":"4-25","name":"間宮林蔵","imageUrl":"https://one-draw.jp/ijinden/cardlist/004/card/04_025.png","expansion":45,"type":1,"level":5,"color":4,"term":0,"trait":0,"legacy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JSON.$A$1];[.$C335];[$JSON.$B$1];[.$E335];[$JSON.$C$1];[.$T335];[$JSON.$D$1];[.$G335];[$JSON.$E$1];[.$I335];[$JSON.$F$1];[.$L335];[$JSON.$G$1];[.$K335];[$JSON.$H$1];[.$O335];[$JSON.$I$1];[.$Q335];[$JSON.$J$1];[.$S335];[$JSON.$K$1];[.$A335];[$JSON.$L$1];[.$B335];[$JSON.$M$1])" office:value-type="string" office:string-value="{&quot;id&quot;:&quot;4-26&quot;,&quot;name&quot;:&quot;徳川斉昭&quot;,&quot;imageUrl&quot;:&quot;https://one-draw.jp/ijinden/cardlist/004/card/04_026.png&quot;,&quot;expansion&quot;:45,&quot;type&quot;:1,&quot;level&quot;:2,&quot;color&quot;:4,&quot;term&quot;:0,&quot;trait&quot;:0,&quot;legacy&quot;:4,&quot;orderTable&quot;:335,&quot;orderDeck&quot;:51}," calcext:value-type="string">
            <text:p>{"id":"4-26","name":"徳川斉昭","imageUrl":"https://one-draw.jp/ijinden/cardlist/004/card/04_026.png","expansion":45,"type":1,"level":2,"color":4,"term":0,"trait":0,"legacy":4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6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6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JSON.$A$1];[.$C336];[$JSON.$B$1];[.$E336];[$JSON.$C$1];[.$T336];[$JSON.$D$1];[.$G336];[$JSON.$E$1];[.$I336];[$JSON.$F$1];[.$L336];[$JSON.$G$1];[.$K336];[$JSON.$H$1];[.$O336];[$JSON.$I$1];[.$Q336];[$JSON.$J$1];[.$S336];[$JSON.$K$1];[.$A336];[$JSON.$L$1];[.$B336];[$JSON.$M$1])" office:value-type="string" office:string-value="{&quot;id&quot;:&quot;4-27&quot;,&quot;name&quot;:&quot;鈴木春信&quot;,&quot;imageUrl&quot;:&quot;https://one-draw.jp/ijinden/cardlist/004/card/04_027.png&quot;,&quot;expansion&quot;:45,&quot;type&quot;:1,&quot;level&quot;:4,&quot;color&quot;:4,&quot;term&quot;:0,&quot;trait&quot;:2,&quot;legacy&quot;:4,&quot;orderTable&quot;:336,&quot;orderDeck&quot;:131}," calcext:value-type="string">
            <text:p>{"id":"4-27","name":"鈴木春信","imageUrl":"https://one-draw.jp/ijinden/cardlist/004/card/04_027.png","expansion":45,"type":1,"level":4,"color":4,"term":0,"trait":2,"legacy":4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7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JSON.$A$1];[.$C337];[$JSON.$B$1];[.$E337];[$JSON.$C$1];[.$T337];[$JSON.$D$1];[.$G337];[$JSON.$E$1];[.$I337];[$JSON.$F$1];[.$L337];[$JSON.$G$1];[.$K337];[$JSON.$H$1];[.$O337];[$JSON.$I$1];[.$Q337];[$JSON.$J$1];[.$S337];[$JSON.$K$1];[.$A337];[$JSON.$L$1];[.$B337];[$JSON.$M$1])" office:value-type="string" office:string-value="{&quot;id&quot;:&quot;4-28&quot;,&quot;name&quot;:&quot;歌川広重&quot;,&quot;imageUrl&quot;:&quot;https://one-draw.jp/ijinden/cardlist/004/card/04_028.png&quot;,&quot;expansion&quot;:45,&quot;type&quot;:1,&quot;level&quot;:3,&quot;color&quot;:4,&quot;term&quot;:0,&quot;trait&quot;:2,&quot;legacy&quot;:4,&quot;orderTable&quot;:337,&quot;orderDeck&quot;:93}," calcext:value-type="string">
            <text:p>{"id":"4-28","name":"歌川広重","imageUrl":"https://one-draw.jp/ijinden/cardlist/004/card/04_028.png","expansion":45,"type":1,"level":3,"color":4,"term":0,"trait":2,"legacy":4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38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JSON.$A$1];[.$C338];[$JSON.$B$1];[.$E338];[$JSON.$C$1];[.$T338];[$JSON.$D$1];[.$G338];[$JSON.$E$1];[.$I338];[$JSON.$F$1];[.$L338];[$JSON.$G$1];[.$K338];[$JSON.$H$1];[.$O338];[$JSON.$I$1];[.$Q338];[$JSON.$J$1];[.$S338];[$JSON.$K$1];[.$A338];[$JSON.$L$1];[.$B338];[$JSON.$M$1])" office:value-type="string" office:string-value="{&quot;id&quot;:&quot;4-29&quot;,&quot;name&quot;:&quot;松平容保&quot;,&quot;imageUrl&quot;:&quot;https://one-draw.jp/ijinden/cardlist/004/card/04_029.png&quot;,&quot;expansion&quot;:45,&quot;type&quot;:1,&quot;level&quot;:3,&quot;color&quot;:8,&quot;term&quot;:0,&quot;trait&quot;:0,&quot;legacy&quot;:9,&quot;orderTable&quot;:338,&quot;orderDeck&quot;:99}," calcext:value-type="string">
            <text:p>{"id":"4-29","name":"松平容保","imageUrl":"https://one-draw.jp/ijinden/cardlist/004/card/04_029.png","expansion":45,"type":1,"level":3,"color":8,"term":0,"trait":0,"legacy":9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39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JSON.$A$1];[.$C339];[$JSON.$B$1];[.$E339];[$JSON.$C$1];[.$T339];[$JSON.$D$1];[.$G339];[$JSON.$E$1];[.$I339];[$JSON.$F$1];[.$L339];[$JSON.$G$1];[.$K339];[$JSON.$H$1];[.$O339];[$JSON.$I$1];[.$Q339];[$JSON.$J$1];[.$S339];[$JSON.$K$1];[.$A339];[$JSON.$L$1];[.$B339];[$JSON.$M$1])" office:value-type="string" office:string-value="{&quot;id&quot;:&quot;4-30&quot;,&quot;name&quot;:&quot;新島八重&quot;,&quot;imageUrl&quot;:&quot;https://one-draw.jp/ijinden/cardlist/004/card/04_030.png&quot;,&quot;expansion&quot;:45,&quot;type&quot;:1,&quot;level&quot;:2,&quot;color&quot;:8,&quot;term&quot;:0,&quot;trait&quot;:0,&quot;legacy&quot;:4,&quot;orderTable&quot;:339,&quot;orderDeck&quot;:57}," calcext:value-type="string">
            <text:p>{"id":"4-30","name":"新島八重","imageUrl":"https://one-draw.jp/ijinden/cardlist/004/card/04_030.png","expansion":45,"type":1,"level":2,"color":8,"term":0,"trait":0,"legacy":4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40];[$特性番号.$A$1:$特性番号.$B$8];2;0);0)" office:value-type="float" office:value="2" calcext:value-type="float">
            <text:p>2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JSON.$A$1];[.$C340];[$JSON.$B$1];[.$E340];[$JSON.$C$1];[.$T340];[$JSON.$D$1];[.$G340];[$JSON.$E$1];[.$I340];[$JSON.$F$1];[.$L340];[$JSON.$G$1];[.$K340];[$JSON.$H$1];[.$O340];[$JSON.$I$1];[.$Q340];[$JSON.$J$1];[.$S340];[$JSON.$K$1];[.$A340];[$JSON.$L$1];[.$B340];[$JSON.$M$1])" office:value-type="string" office:string-value="{&quot;id&quot;:&quot;4-31&quot;,&quot;name&quot;:&quot;尾形光琳&quot;,&quot;imageUrl&quot;:&quot;https://one-draw.jp/ijinden/cardlist/004/card/04_031.png&quot;,&quot;expansion&quot;:45,&quot;type&quot;:1,&quot;level&quot;:5,&quot;color&quot;:8,&quot;term&quot;:0,&quot;trait&quot;:2,&quot;legacy&quot;:4,&quot;orderTable&quot;:340,&quot;orderDeck&quot;:176}," calcext:value-type="string">
            <text:p>{"id":"4-31","name":"尾形光琳","imageUrl":"https://one-draw.jp/ijinden/cardlist/004/card/04_031.png","expansion":45,"type":1,"level":5,"color":8,"term":0,"trait":2,"legacy":4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1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JSON.$A$1];[.$C341];[$JSON.$B$1];[.$E341];[$JSON.$C$1];[.$T341];[$JSON.$D$1];[.$G341];[$JSON.$E$1];[.$I341];[$JSON.$F$1];[.$L341];[$JSON.$G$1];[.$K341];[$JSON.$H$1];[.$O341];[$JSON.$I$1];[.$Q341];[$JSON.$J$1];[.$S341];[$JSON.$K$1];[.$A341];[$JSON.$L$1];[.$B341];[$JSON.$M$1])" office:value-type="string" office:string-value="{&quot;id&quot;:&quot;4-32&quot;,&quot;name&quot;:&quot;滝沢馬琴&quot;,&quot;imageUrl&quot;:&quot;https://one-draw.jp/ijinden/cardlist/004/card/04_032.png&quot;,&quot;expansion&quot;:45,&quot;type&quot;:1,&quot;level&quot;:3,&quot;color&quot;:8,&quot;term&quot;:2,&quot;trait&quot;:0,&quot;legacy&quot;:4,&quot;orderTable&quot;:341,&quot;orderDeck&quot;:100}," calcext:value-type="string">
            <text:p>{"id":"4-32","name":"滝沢馬琴","imageUrl":"https://one-draw.jp/ijinden/cardlist/004/card/04_032.png","expansion":45,"type":1,"level":3,"color":8,"term":2,"trait":0,"legacy":4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木霊</text:p>
          </table:table-cell>
          <table:table-cell table:formula="of:=IFERROR(VLOOKUP([.$R342];[$遺業能力番号.$A$1:$遺業能力番号.$B$9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JSON.$A$1];[.$C342];[$JSON.$B$1];[.$E342];[$JSON.$C$1];[.$T342];[$JSON.$D$1];[.$G342];[$JSON.$E$1];[.$I342];[$JSON.$F$1];[.$L342];[$JSON.$G$1];[.$K342];[$JSON.$H$1];[.$O342];[$JSON.$I$1];[.$Q342];[$JSON.$J$1];[.$S342];[$JSON.$K$1];[.$A342];[$JSON.$L$1];[.$B342];[$JSON.$M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level&quot;:6,&quot;color&quot;:8,&quot;term&quot;:2,&quot;trait&quot;:0,&quot;legacy&quot;:8,&quot;orderTable&quot;:342,&quot;orderDeck&quot;:199}," calcext:value-type="string">
            <text:p>{"id":"4-33","name":"メアリー・ゴドウィン・シェリー","imageUrl":"https://one-draw.jp/ijinden/cardlist/004/card/04_033.png","expansion":45,"type":1,"level":6,"color":8,"term":2,"trait":0,"legacy":8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3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JSON.$A$1];[.$C343];[$JSON.$B$1];[.$E343];[$JSON.$C$1];[.$T343];[$JSON.$D$1];[.$G343];[$JSON.$E$1];[.$I343];[$JSON.$F$1];[.$L343];[$JSON.$G$1];[.$K343];[$JSON.$H$1];[.$O343];[$JSON.$I$1];[.$Q343];[$JSON.$J$1];[.$S343];[$JSON.$K$1];[.$A343];[$JSON.$L$1];[.$B343];[$JSON.$M$1])" office:value-type="string" office:string-value="{&quot;id&quot;:&quot;4-34&quot;,&quot;name&quot;:&quot;西郷頼母&quot;,&quot;imageUrl&quot;:&quot;https://one-draw.jp/ijinden/cardlist/004/card/04_034.png&quot;,&quot;expansion&quot;:45,&quot;type&quot;:1,&quot;level&quot;:4,&quot;color&quot;:8,&quot;term&quot;:0,&quot;trait&quot;:0,&quot;legacy&quot;:4,&quot;orderTable&quot;:343,&quot;orderDeck&quot;:138}," calcext:value-type="string">
            <text:p>{"id":"4-34","name":"西郷頼母","imageUrl":"https://one-draw.jp/ijinden/cardlist/004/card/04_034.png","expansion":45,"type":1,"level":4,"color":8,"term":0,"trait":0,"legacy":4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344];[$特性番号.$A$1:$特性番号.$B$8];2;0);0)" office:value-type="float" office:value="33" calcext:value-type="float">
            <text:p>33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4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JSON.$A$1];[.$C344];[$JSON.$B$1];[.$E344];[$JSON.$C$1];[.$T344];[$JSON.$D$1];[.$G344];[$JSON.$E$1];[.$I344];[$JSON.$F$1];[.$L344];[$JSON.$G$1];[.$K344];[$JSON.$H$1];[.$O344];[$JSON.$I$1];[.$Q344];[$JSON.$J$1];[.$S344];[$JSON.$K$1];[.$A344];[$JSON.$L$1];[.$B344];[$JSON.$M$1])" office:value-type="string" office:string-value="{&quot;id&quot;:&quot;4-35&quot;,&quot;name&quot;:&quot;沖田総司&quot;,&quot;imageUrl&quot;:&quot;https://one-draw.jp/ijinden/cardlist/004/card/04_035.png&quot;,&quot;expansion&quot;:45,&quot;type&quot;:1,&quot;level&quot;:2,&quot;color&quot;:16,&quot;term&quot;:0,&quot;trait&quot;:33,&quot;legacy&quot;:4,&quot;orderTable&quot;:344,&quot;orderDeck&quot;:61}," calcext:value-type="string">
            <text:p>{"id":"4-35","name":"沖田総司","imageUrl":"https://one-draw.jp/ijinden/cardlist/004/card/04_035.png","expansion":45,"type":1,"level":2,"color":16,"term":0,"trait":33,"legacy":4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5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5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JSON.$A$1];[.$C345];[$JSON.$B$1];[.$E345];[$JSON.$C$1];[.$T345];[$JSON.$D$1];[.$G345];[$JSON.$E$1];[.$I345];[$JSON.$F$1];[.$L345];[$JSON.$G$1];[.$K345];[$JSON.$H$1];[.$O345];[$JSON.$I$1];[.$Q345];[$JSON.$J$1];[.$S345];[$JSON.$K$1];[.$A345];[$JSON.$L$1];[.$B345];[$JSON.$M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level&quot;:1,&quot;color&quot;:16,&quot;term&quot;:0,&quot;trait&quot;:0,&quot;legacy&quot;:0,&quot;orderTable&quot;:345,&quot;orderDeck&quot;:23}," calcext:value-type="string">
            <text:p>{"id":"4-36","name":"ジョバンニ＝ディ＝メディチ","imageUrl":"https://one-draw.jp/ijinden/cardlist/004/card/04_036.png","expansion":45,"type":1,"level":1,"color":16,"term":0,"trait":0,"legacy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6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反魂</text:p>
          </table:table-cell>
          <table:table-cell table:formula="of:=IFERROR(VLOOKUP([.$R346];[$遺業能力番号.$A$1:$遺業能力番号.$B$9];2;0);0)" office:value-type="float" office:value="6" calcext:value-type="float">
            <text:p>6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JSON.$A$1];[.$C346];[$JSON.$B$1];[.$E346];[$JSON.$C$1];[.$T346];[$JSON.$D$1];[.$G346];[$JSON.$E$1];[.$I346];[$JSON.$F$1];[.$L346];[$JSON.$G$1];[.$K346];[$JSON.$H$1];[.$O346];[$JSON.$I$1];[.$Q346];[$JSON.$J$1];[.$S346];[$JSON.$K$1];[.$A346];[$JSON.$L$1];[.$B346];[$JSON.$M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level&quot;:2,&quot;color&quot;:16,&quot;term&quot;:0,&quot;trait&quot;:16,&quot;legacy&quot;:6,&quot;orderTable&quot;:346,&quot;orderDeck&quot;:62}," calcext:value-type="string">
            <text:p>{"id":"4-37","name":"フローレンス・ナイチンゲール","imageUrl":"https://one-draw.jp/ijinden/cardlist/004/card/04_037.png","expansion":45,"type":1,"level":2,"color":16,"term":0,"trait":16,"legacy":6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7];[$特性番号.$A$1:$特性番号.$B$8];2;0);0)" office:value-type="float" office:value="16" calcext:value-type="float">
            <text:p>16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47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JSON.$A$1];[.$C347];[$JSON.$B$1];[.$E347];[$JSON.$C$1];[.$T347];[$JSON.$D$1];[.$G347];[$JSON.$E$1];[.$I347];[$JSON.$F$1];[.$L347];[$JSON.$G$1];[.$K347];[$JSON.$H$1];[.$O347];[$JSON.$I$1];[.$Q347];[$JSON.$J$1];[.$S347];[$JSON.$K$1];[.$A347];[$JSON.$L$1];[.$B347];[$JSON.$M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level&quot;:5,&quot;color&quot;:16,&quot;term&quot;:0,&quot;trait&quot;:16,&quot;legacy&quot;:4,&quot;orderTable&quot;:347,&quot;orderDeck&quot;:179}," calcext:value-type="string">
            <text:p>{"id":"4-38","name":"ミシェル・ノストラダムス","imageUrl":"https://one-draw.jp/ijinden/cardlist/004/card/04_038.png","expansion":45,"type":1,"level":5,"color":16,"term":0,"trait":16,"legacy":4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JSON.$A$1];[.$C348];[$JSON.$B$1];[.$E348];[$JSON.$C$1];[.$T348];[$JSON.$D$1];[.$G348];[$JSON.$E$1];[.$I348];[$JSON.$F$1];[.$L348];[$JSON.$G$1];[.$K348];[$JSON.$H$1];[.$O348];[$JSON.$I$1];[.$Q348];[$JSON.$J$1];[.$S348];[$JSON.$K$1];[.$A348];[$JSON.$L$1];[.$B348];[$JSON.$M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level&quot;:3,&quot;color&quot;:16,&quot;term&quot;:0,&quot;trait&quot;:0,&quot;legacy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level":3,"color":16,"term":0,"trait":0,"legacy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4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JSON.$A$1];[.$C349];[$JSON.$B$1];[.$E349];[$JSON.$C$1];[.$T349];[$JSON.$D$1];[.$G349];[$JSON.$E$1];[.$I349];[$JSON.$F$1];[.$L349];[$JSON.$G$1];[.$K349];[$JSON.$H$1];[.$O349];[$JSON.$I$1];[.$Q349];[$JSON.$J$1];[.$S349];[$JSON.$K$1];[.$A349];[$JSON.$L$1];[.$B349];[$JSON.$M$1])" office:value-type="string" office:string-value="{&quot;id&quot;:&quot;4-40&quot;,&quot;name&quot;:&quot;榎本武揚&quot;,&quot;imageUrl&quot;:&quot;https://one-draw.jp/ijinden/cardlist/004/card/04_040.png&quot;,&quot;expansion&quot;:45,&quot;type&quot;:1,&quot;level&quot;:6,&quot;color&quot;:16,&quot;term&quot;:1,&quot;trait&quot;:0,&quot;legacy&quot;:0,&quot;orderTable&quot;:349,&quot;orderDeck&quot;:202}," calcext:value-type="string">
            <text:p>{"id":"4-40","name":"榎本武揚","imageUrl":"https://one-draw.jp/ijinden/cardlist/004/card/04_040.png","expansion":45,"type":1,"level":6,"color":16,"term":1,"trait":0,"legacy":0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50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JSON.$A$1];[.$C350];[$JSON.$B$1];[.$E350];[$JSON.$C$1];[.$T350];[$JSON.$D$1];[.$G350];[$JSON.$E$1];[.$I350];[$JSON.$F$1];[.$L350];[$JSON.$G$1];[.$K350];[$JSON.$H$1];[.$O350];[$JSON.$I$1];[.$Q350];[$JSON.$J$1];[.$S350];[$JSON.$K$1];[.$A350];[$JSON.$L$1];[.$B350];[$JSON.$M$1])" office:value-type="string" office:string-value="{&quot;id&quot;:&quot;4-41&quot;,&quot;name&quot;:&quot;無礼打&quot;,&quot;imageUrl&quot;:&quot;https://one-draw.jp/ijinden/cardlist/004/card/04_041.png&quot;,&quot;expansion&quot;:45,&quot;type&quot;:2,&quot;level&quot;:3,&quot;color&quot;:1,&quot;term&quot;:0,&quot;trait&quot;:0,&quot;legacy&quot;:4,&quot;orderTable&quot;:350,&quot;orderDeck&quot;:250}," calcext:value-type="string">
            <text:p>{"id":"4-41","name":"無礼打","imageUrl":"https://one-draw.jp/ijinden/cardlist/004/card/04_041.png","expansion":45,"type":2,"level":3,"color":1,"term":0,"trait":0,"legacy":4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1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1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JSON.$A$1];[.$C351];[$JSON.$B$1];[.$E351];[$JSON.$C$1];[.$T351];[$JSON.$D$1];[.$G351];[$JSON.$E$1];[.$I351];[$JSON.$F$1];[.$L351];[$JSON.$G$1];[.$K351];[$JSON.$H$1];[.$O351];[$JSON.$I$1];[.$Q351];[$JSON.$J$1];[.$S351];[$JSON.$K$1];[.$A351];[$JSON.$L$1];[.$B351];[$JSON.$M$1])" office:value-type="string" office:string-value="{&quot;id&quot;:&quot;4-42&quot;,&quot;name&quot;:&quot;紡績工場&quot;,&quot;imageUrl&quot;:&quot;https://one-draw.jp/ijinden/cardlist/004/card/04_042.png&quot;,&quot;expansion&quot;:45,&quot;type&quot;:2,&quot;level&quot;:2,&quot;color&quot;:1,&quot;term&quot;:0,&quot;trait&quot;:0,&quot;legacy&quot;:0,&quot;orderTable&quot;:351,&quot;orderDeck&quot;:241}," calcext:value-type="string">
            <text:p>{"id":"4-42","name":"紡績工場","imageUrl":"https://one-draw.jp/ijinden/cardlist/004/card/04_042.png","expansion":45,"type":2,"level":2,"color":1,"term":0,"trait":0,"legacy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5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JSON.$A$1];[.$C352];[$JSON.$B$1];[.$E352];[$JSON.$C$1];[.$T352];[$JSON.$D$1];[.$G352];[$JSON.$E$1];[.$I352];[$JSON.$F$1];[.$L352];[$JSON.$G$1];[.$K352];[$JSON.$H$1];[.$O352];[$JSON.$I$1];[.$Q352];[$JSON.$J$1];[.$S352];[$JSON.$K$1];[.$A352];[$JSON.$L$1];[.$B352];[$JSON.$M$1])" office:value-type="string" office:string-value="{&quot;id&quot;:&quot;4-43&quot;,&quot;name&quot;:&quot;火と氷の大地&quot;,&quot;imageUrl&quot;:&quot;https://one-draw.jp/ijinden/cardlist/004/card/04_043.png&quot;,&quot;expansion&quot;:45,&quot;type&quot;:2,&quot;level&quot;:1,&quot;color&quot;:2,&quot;term&quot;:0,&quot;trait&quot;:0,&quot;legacy&quot;:5,&quot;orderTable&quot;:352,&quot;orderDeck&quot;:238}," calcext:value-type="string">
            <text:p>{"id":"4-43","name":"火と氷の大地","imageUrl":"https://one-draw.jp/ijinden/cardlist/004/card/04_043.png","expansion":45,"type":2,"level":1,"color":2,"term":0,"trait":0,"legacy":5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_思想</text:p>
          </table:table-cell>
          <table:table-cell table:formula="of:=IFERROR(VLOOKUP([.$P353];[$特性番号.$A$1:$特性番号.$B$8];2;0);0)" office:value-type="float" office:value="10" calcext:value-type="float">
            <text:p>1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3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JSON.$A$1];[.$C353];[$JSON.$B$1];[.$E353];[$JSON.$C$1];[.$T353];[$JSON.$D$1];[.$G353];[$JSON.$E$1];[.$I353];[$JSON.$F$1];[.$L353];[$JSON.$G$1];[.$K353];[$JSON.$H$1];[.$O353];[$JSON.$I$1];[.$Q353];[$JSON.$J$1];[.$S353];[$JSON.$K$1];[.$A353];[$JSON.$L$1];[.$B353];[$JSON.$M$1])" office:value-type="string" office:string-value="{&quot;id&quot;:&quot;4-44&quot;,&quot;name&quot;:&quot;落日の王宮&quot;,&quot;imageUrl&quot;:&quot;https://one-draw.jp/ijinden/cardlist/004/card/04_044.png&quot;,&quot;expansion&quot;:45,&quot;type&quot;:2,&quot;level&quot;:6,&quot;color&quot;:2,&quot;term&quot;:0,&quot;trait&quot;:10,&quot;legacy&quot;:0,&quot;orderTable&quot;:353,&quot;orderDeck&quot;:275}," calcext:value-type="string">
            <text:p>{"id":"4-44","name":"落日の王宮","imageUrl":"https://one-draw.jp/ijinden/cardlist/004/card/04_044.png","expansion":45,"type":2,"level":6,"color":2,"term":0,"trait":10,"legacy":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4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4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JSON.$A$1];[.$C354];[$JSON.$B$1];[.$E354];[$JSON.$C$1];[.$T354];[$JSON.$D$1];[.$G354];[$JSON.$E$1];[.$I354];[$JSON.$F$1];[.$L354];[$JSON.$G$1];[.$K354];[$JSON.$H$1];[.$O354];[$JSON.$I$1];[.$Q354];[$JSON.$J$1];[.$S354];[$JSON.$K$1];[.$A354];[$JSON.$L$1];[.$B354];[$JSON.$M$1])" office:value-type="string" office:string-value="{&quot;id&quot;:&quot;4-45&quot;,&quot;name&quot;:&quot;遣外使節団&quot;,&quot;imageUrl&quot;:&quot;https://one-draw.jp/ijinden/cardlist/004/card/04_045.png&quot;,&quot;expansion&quot;:45,&quot;type&quot;:2,&quot;level&quot;:3,&quot;color&quot;:4,&quot;term&quot;:0,&quot;trait&quot;:0,&quot;legacy&quot;:0,&quot;orderTable&quot;:354,&quot;orderDeck&quot;:254}," calcext:value-type="string">
            <text:p>{"id":"4-45","name":"遣外使節団","imageUrl":"https://one-draw.jp/ijinden/cardlist/004/card/04_045.png","expansion":45,"type":2,"level":3,"color":4,"term":0,"trait":0,"legacy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5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JSON.$A$1];[.$C355];[$JSON.$B$1];[.$E355];[$JSON.$C$1];[.$T355];[$JSON.$D$1];[.$G355];[$JSON.$E$1];[.$I355];[$JSON.$F$1];[.$L355];[$JSON.$G$1];[.$K355];[$JSON.$H$1];[.$O355];[$JSON.$I$1];[.$Q355];[$JSON.$J$1];[.$S355];[$JSON.$K$1];[.$A355];[$JSON.$L$1];[.$B355];[$JSON.$M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level&quot;:17,&quot;color&quot;:4,&quot;term&quot;:0,&quot;trait&quot;:0,&quot;legacy&quot;:1,&quot;orderTable&quot;:355,&quot;orderDeck&quot;:280}," calcext:value-type="string">
            <text:p>{"id":"4-46","name":"大日本沿海輿地全図","imageUrl":"https://one-draw.jp/ijinden/cardlist/004/card/04_046.png","expansion":45,"type":2,"level":17,"color":4,"term":0,"trait":0,"legacy":1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56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JSON.$A$1];[.$C356];[$JSON.$B$1];[.$E356];[$JSON.$C$1];[.$T356];[$JSON.$D$1];[.$G356];[$JSON.$E$1];[.$I356];[$JSON.$F$1];[.$L356];[$JSON.$G$1];[.$K356];[$JSON.$H$1];[.$O356];[$JSON.$I$1];[.$Q356];[$JSON.$J$1];[.$S356];[$JSON.$K$1];[.$A356];[$JSON.$L$1];[.$B356];[$JSON.$M$1])" office:value-type="string" office:string-value="{&quot;id&quot;:&quot;4-47&quot;,&quot;name&quot;:&quot;マザーグース&quot;,&quot;imageUrl&quot;:&quot;https://one-draw.jp/ijinden/cardlist/004/card/04_047.png&quot;,&quot;expansion&quot;:45,&quot;type&quot;:2,&quot;level&quot;:3,&quot;color&quot;:8,&quot;term&quot;:2,&quot;trait&quot;:0,&quot;legacy&quot;:9,&quot;orderTable&quot;:356,&quot;orderDeck&quot;:258}," calcext:value-type="string">
            <text:p>{"id":"4-47","name":"マザーグース","imageUrl":"https://one-draw.jp/ijinden/cardlist/004/card/04_047.png","expansion":45,"type":2,"level":3,"color":8,"term":2,"trait":0,"legacy":9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山札の上か下に戻す</text:p>
          </table:table-cell>
          <table:table-cell table:formula="of:=IFERROR(VLOOKUP([.$R357];[$遺業能力番号.$A$1:$遺業能力番号.$B$9];2;0);0)" office:value-type="float" office:value="7" calcext:value-type="float">
            <text:p>7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JSON.$A$1];[.$C357];[$JSON.$B$1];[.$E357];[$JSON.$C$1];[.$T357];[$JSON.$D$1];[.$G357];[$JSON.$E$1];[.$I357];[$JSON.$F$1];[.$L357];[$JSON.$G$1];[.$K357];[$JSON.$H$1];[.$O357];[$JSON.$I$1];[.$Q357];[$JSON.$J$1];[.$S357];[$JSON.$K$1];[.$A357];[$JSON.$L$1];[.$B357];[$JSON.$M$1])" office:value-type="string" office:string-value="{&quot;id&quot;:&quot;4-48&quot;,&quot;name&quot;:&quot;遠征軍&quot;,&quot;imageUrl&quot;:&quot;https://one-draw.jp/ijinden/cardlist/004/card/04_048.png&quot;,&quot;expansion&quot;:45,&quot;type&quot;:2,&quot;level&quot;:4,&quot;color&quot;:8,&quot;term&quot;:0,&quot;trait&quot;:0,&quot;legacy&quot;:7,&quot;orderTable&quot;:357,&quot;orderDeck&quot;:265}," calcext:value-type="string">
            <text:p>{"id":"4-48","name":"遠征軍","imageUrl":"https://one-draw.jp/ijinden/cardlist/004/card/04_048.png","expansion":45,"type":2,"level":4,"color":8,"term":0,"trait":0,"legacy":7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8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8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JSON.$A$1];[.$C358];[$JSON.$B$1];[.$E358];[$JSON.$C$1];[.$T358];[$JSON.$D$1];[.$G358];[$JSON.$E$1];[.$I358];[$JSON.$F$1];[.$L358];[$JSON.$G$1];[.$K358];[$JSON.$H$1];[.$O358];[$JSON.$I$1];[.$Q358];[$JSON.$J$1];[.$S358];[$JSON.$K$1];[.$A358];[$JSON.$L$1];[.$B358];[$JSON.$M$1])" office:value-type="string" office:string-value="{&quot;id&quot;:&quot;4-49&quot;,&quot;name&quot;:&quot;蝦夷共和国&quot;,&quot;imageUrl&quot;:&quot;https://one-draw.jp/ijinden/cardlist/004/card/04_049.png&quot;,&quot;expansion&quot;:45,&quot;type&quot;:2,&quot;level&quot;:5,&quot;color&quot;:16,&quot;term&quot;:0,&quot;trait&quot;:0,&quot;legacy&quot;:0,&quot;orderTable&quot;:358,&quot;orderDeck&quot;:272}," calcext:value-type="string">
            <text:p>{"id":"4-49","name":"蝦夷共和国","imageUrl":"https://one-draw.jp/ijinden/cardlist/004/card/04_049.png","expansion":45,"type":2,"level":5,"color":16,"term":0,"trait":0,"legacy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9];[$特性番号.$A$1:$特性番号.$B$8];2;0);0)" office:value-type="float" office:value="0" calcext:value-type="float">
            <text:p>0</text:p>
          </table:table-cell>
          <table:table-cell table:style-name="ce8" table:formula="of:=NA()" office:value-type="string" office:string-value="" calcext:value-type="error">
            <text:p>#N/A</text:p>
          </table:table-cell>
          <table:table-cell table:formula="of:=IFERROR(VLOOKUP([.$R359];[$遺業能力番号.$A$1:$遺業能力番号.$B$9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JSON.$A$1];[.$C359];[$JSON.$B$1];[.$E359];[$JSON.$C$1];[.$T359];[$JSON.$D$1];[.$G359];[$JSON.$E$1];[.$I359];[$JSON.$F$1];[.$L359];[$JSON.$G$1];[.$K359];[$JSON.$H$1];[.$O359];[$JSON.$I$1];[.$Q359];[$JSON.$J$1];[.$S359];[$JSON.$K$1];[.$A359];[$JSON.$L$1];[.$B359];[$JSON.$M$1])" office:value-type="string" office:string-value="{&quot;id&quot;:&quot;4-50&quot;,&quot;name&quot;:&quot;喀血の流行り病&quot;,&quot;imageUrl&quot;:&quot;https://one-draw.jp/ijinden/cardlist/004/card/04_050.png&quot;,&quot;expansion&quot;:45,&quot;type&quot;:2,&quot;level&quot;:5,&quot;color&quot;:16,&quot;term&quot;:0,&quot;trait&quot;:0,&quot;legacy&quot;:0,&quot;orderTable&quot;:359,&quot;orderDeck&quot;:273}," calcext:value-type="string">
            <text:p>{"id":"4-50","name":"喀血の流行り病","imageUrl":"https://one-draw.jp/ijinden/cardlist/004/card/04_050.png","expansion":45,"type":2,"level":5,"color":16,"term":0,"trait":0,"legacy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JSON.$A$1];[.$C360];[$JSON.$B$1];[.$E360];[$JSON.$C$1];[.$T360];[$JSON.$D$1];[.$G360];[$JSON.$E$1];[.$I360];[$JSON.$F$1];[.$L360];[$JSON.$G$1];[.$K360];[$JSON.$H$1];[.$O360];[$JSON.$I$1];[.$Q360];[$JSON.$J$1];[.$S360];[$JSON.$K$1];[.$A360];[$JSON.$L$1];[.$B360];[$JSON.$M$1])" office:value-type="string" office:string-value="{&quot;id&quot;:&quot;4-51&quot;,&quot;name&quot;:&quot;カーバナイズ&quot;,&quot;imageUrl&quot;:&quot;https://one-draw.jp/ijinden/cardlist/004/card/04_051.png&quot;,&quot;expansion&quot;:45,&quot;type&quot;:3,&quot;level&quot;:1,&quot;color&quot;:1,&quot;term&quot;:0,&quot;trait&quot;:0,&quot;legacy&quot;:2,&quot;orderTable&quot;:360,&quot;orderDeck&quot;:282}," calcext:value-type="string">
            <text:p>{"id":"4-51","name":"カーバナイズ","imageUrl":"https://one-draw.jp/ijinden/cardlist/004/card/04_051.png","expansion":45,"type":3,"level":1,"color":1,"term":0,"trait":0,"legacy":2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JSON.$A$1];[.$C361];[$JSON.$B$1];[.$E361];[$JSON.$C$1];[.$T361];[$JSON.$D$1];[.$G361];[$JSON.$E$1];[.$I361];[$JSON.$F$1];[.$L361];[$JSON.$G$1];[.$K361];[$JSON.$H$1];[.$O361];[$JSON.$I$1];[.$Q361];[$JSON.$J$1];[.$S361];[$JSON.$K$1];[.$A361];[$JSON.$L$1];[.$B361];[$JSON.$M$1])" office:value-type="string" office:string-value="{&quot;id&quot;:&quot;4-52&quot;,&quot;name&quot;:&quot;ソーラーフレア&quot;,&quot;imageUrl&quot;:&quot;https://one-draw.jp/ijinden/cardlist/004/card/04_052.png&quot;,&quot;expansion&quot;:45,&quot;type&quot;:3,&quot;level&quot;:5,&quot;color&quot;:1,&quot;term&quot;:0,&quot;trait&quot;:0,&quot;legacy&quot;:2,&quot;orderTable&quot;:361,&quot;orderDeck&quot;:325}," calcext:value-type="string">
            <text:p>{"id":"4-52","name":"ソーラーフレア","imageUrl":"https://one-draw.jp/ijinden/cardlist/004/card/04_052.png","expansion":45,"type":3,"level":5,"color":1,"term":0,"trait":0,"legacy":2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62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JSON.$A$1];[.$C362];[$JSON.$B$1];[.$E362];[$JSON.$C$1];[.$T362];[$JSON.$D$1];[.$G362];[$JSON.$E$1];[.$I362];[$JSON.$F$1];[.$L362];[$JSON.$G$1];[.$K362];[$JSON.$H$1];[.$O362];[$JSON.$I$1];[.$Q362];[$JSON.$J$1];[.$S362];[$JSON.$K$1];[.$A362];[$JSON.$L$1];[.$B362];[$JSON.$M$1])" office:value-type="string" office:string-value="{&quot;id&quot;:&quot;4-53&quot;,&quot;name&quot;:&quot;フール&quot;,&quot;imageUrl&quot;:&quot;https://one-draw.jp/ijinden/cardlist/004/card/04_053.png&quot;,&quot;expansion&quot;:45,&quot;type&quot;:3,&quot;level&quot;:0,&quot;color&quot;:2,&quot;term&quot;:0,&quot;trait&quot;:0,&quot;legacy&quot;:4,&quot;orderTable&quot;:362,&quot;orderDeck&quot;:281}," calcext:value-type="string">
            <text:p>{"id":"4-53","name":"フール","imageUrl":"https://one-draw.jp/ijinden/cardlist/004/card/04_053.png","expansion":45,"type":3,"level":0,"color":2,"term":0,"trait":0,"legacy":4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JSON.$A$1];[.$C363];[$JSON.$B$1];[.$E363];[$JSON.$C$1];[.$T363];[$JSON.$D$1];[.$G363];[$JSON.$E$1];[.$I363];[$JSON.$F$1];[.$L363];[$JSON.$G$1];[.$K363];[$JSON.$H$1];[.$O363];[$JSON.$I$1];[.$Q363];[$JSON.$J$1];[.$S363];[$JSON.$K$1];[.$A363];[$JSON.$L$1];[.$B363];[$JSON.$M$1])" office:value-type="string" office:string-value="{&quot;id&quot;:&quot;4-54&quot;,&quot;name&quot;:&quot;ドロレス&quot;,&quot;imageUrl&quot;:&quot;https://one-draw.jp/ijinden/cardlist/004/card/04_054.png&quot;,&quot;expansion&quot;:45,&quot;type&quot;:3,&quot;level&quot;:1,&quot;color&quot;:2,&quot;term&quot;:0,&quot;trait&quot;:0,&quot;legacy&quot;:2,&quot;orderTable&quot;:363,&quot;orderDeck&quot;:283}," calcext:value-type="string">
            <text:p>{"id":"4-54","name":"ドロレス","imageUrl":"https://one-draw.jp/ijinden/cardlist/004/card/04_054.png","expansion":45,"type":3,"level":1,"color":2,"term":0,"trait":0,"legacy":2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4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JSON.$A$1];[.$C364];[$JSON.$B$1];[.$E364];[$JSON.$C$1];[.$T364];[$JSON.$D$1];[.$G364];[$JSON.$E$1];[.$I364];[$JSON.$F$1];[.$L364];[$JSON.$G$1];[.$K364];[$JSON.$H$1];[.$O364];[$JSON.$I$1];[.$Q364];[$JSON.$J$1];[.$S364];[$JSON.$K$1];[.$A364];[$JSON.$L$1];[.$B364];[$JSON.$M$1])" office:value-type="string" office:string-value="{&quot;id&quot;:&quot;4-55&quot;,&quot;name&quot;:&quot;デュエル&quot;,&quot;imageUrl&quot;:&quot;https://one-draw.jp/ijinden/cardlist/004/card/04_055.png&quot;,&quot;expansion&quot;:45,&quot;type&quot;:3,&quot;level&quot;:5,&quot;color&quot;:4,&quot;term&quot;:0,&quot;trait&quot;:0,&quot;legacy&quot;:1,&quot;orderTable&quot;:364,&quot;orderDeck&quot;:327}," calcext:value-type="string">
            <text:p>{"id":"4-55","name":"デュエル","imageUrl":"https://one-draw.jp/ijinden/cardlist/004/card/04_055.png","expansion":45,"type":3,"level":5,"color":4,"term":0,"trait":0,"legacy":1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5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JSON.$A$1];[.$C365];[$JSON.$B$1];[.$E365];[$JSON.$C$1];[.$T365];[$JSON.$D$1];[.$G365];[$JSON.$E$1];[.$I365];[$JSON.$F$1];[.$L365];[$JSON.$G$1];[.$K365];[$JSON.$H$1];[.$O365];[$JSON.$I$1];[.$Q365];[$JSON.$J$1];[.$S365];[$JSON.$K$1];[.$A365];[$JSON.$L$1];[.$B365];[$JSON.$M$1])" office:value-type="string" office:string-value="{&quot;id&quot;:&quot;4-56&quot;,&quot;name&quot;:&quot;サーベイング&quot;,&quot;imageUrl&quot;:&quot;https://one-draw.jp/ijinden/cardlist/004/card/04_056.png&quot;,&quot;expansion&quot;:45,&quot;type&quot;:3,&quot;level&quot;:3,&quot;color&quot;:4,&quot;term&quot;:0,&quot;trait&quot;:0,&quot;legacy&quot;:1,&quot;orderTable&quot;:365,&quot;orderDeck&quot;:310}," calcext:value-type="string">
            <text:p>{"id":"4-56","name":"サーベイング","imageUrl":"https://one-draw.jp/ijinden/cardlist/004/card/04_056.png","expansion":45,"type":3,"level":3,"color":4,"term":0,"trait":0,"legacy":1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6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JSON.$A$1];[.$C366];[$JSON.$B$1];[.$E366];[$JSON.$C$1];[.$T366];[$JSON.$D$1];[.$G366];[$JSON.$E$1];[.$I366];[$JSON.$F$1];[.$L366];[$JSON.$G$1];[.$K366];[$JSON.$H$1];[.$O366];[$JSON.$I$1];[.$Q366];[$JSON.$J$1];[.$S366];[$JSON.$K$1];[.$A366];[$JSON.$L$1];[.$B366];[$JSON.$M$1])" office:value-type="string" office:string-value="{&quot;id&quot;:&quot;4-57&quot;,&quot;name&quot;:&quot;ソレイユ&quot;,&quot;imageUrl&quot;:&quot;https://one-draw.jp/ijinden/cardlist/004/card/04_057.png&quot;,&quot;expansion&quot;:45,&quot;type&quot;:3,&quot;level&quot;:3,&quot;color&quot;:8,&quot;term&quot;:48,&quot;trait&quot;:0,&quot;legacy&quot;:2,&quot;orderTable&quot;:366,&quot;orderDeck&quot;:311}," calcext:value-type="string">
            <text:p>{"id":"4-57","name":"ソレイユ","imageUrl":"https://one-draw.jp/ijinden/cardlist/004/card/04_057.png","expansion":45,"type":3,"level":3,"color":8,"term":48,"trait":0,"legacy":2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67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JSON.$A$1];[.$C367];[$JSON.$B$1];[.$E367];[$JSON.$C$1];[.$T367];[$JSON.$D$1];[.$G367];[$JSON.$E$1];[.$I367];[$JSON.$F$1];[.$L367];[$JSON.$G$1];[.$K367];[$JSON.$H$1];[.$O367];[$JSON.$I$1];[.$Q367];[$JSON.$J$1];[.$S367];[$JSON.$K$1];[.$A367];[$JSON.$L$1];[.$B367];[$JSON.$M$1])" office:value-type="string" office:string-value="{&quot;id&quot;:&quot;4-58&quot;,&quot;name&quot;:&quot;ルーナ&quot;,&quot;imageUrl&quot;:&quot;https://one-draw.jp/ijinden/cardlist/004/card/04_058.png&quot;,&quot;expansion&quot;:45,&quot;type&quot;:3,&quot;level&quot;:3,&quot;color&quot;:8,&quot;term&quot;:80,&quot;trait&quot;:0,&quot;legacy&quot;:2,&quot;orderTable&quot;:367,&quot;orderDeck&quot;:312}," calcext:value-type="string">
            <text:p>{"id":"4-58","name":"ルーナ","imageUrl":"https://one-draw.jp/ijinden/cardlist/004/card/04_058.png","expansion":45,"type":3,"level":3,"color":8,"term":80,"trait":0,"legacy":2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6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JSON.$A$1];[.$C368];[$JSON.$B$1];[.$E368];[$JSON.$C$1];[.$T368];[$JSON.$D$1];[.$G368];[$JSON.$E$1];[.$I368];[$JSON.$F$1];[.$L368];[$JSON.$G$1];[.$K368];[$JSON.$H$1];[.$O368];[$JSON.$I$1];[.$Q368];[$JSON.$J$1];[.$S368];[$JSON.$K$1];[.$A368];[$JSON.$L$1];[.$B368];[$JSON.$M$1])" office:value-type="string" office:string-value="{&quot;id&quot;:&quot;4-59&quot;,&quot;name&quot;:&quot;リユニオン&quot;,&quot;imageUrl&quot;:&quot;https://one-draw.jp/ijinden/cardlist/004/card/04_059.png&quot;,&quot;expansion&quot;:45,&quot;type&quot;:3,&quot;level&quot;:5,&quot;color&quot;:16,&quot;term&quot;:0,&quot;trait&quot;:0,&quot;legacy&quot;:1,&quot;orderTable&quot;:368,&quot;orderDeck&quot;:331}," calcext:value-type="string">
            <text:p>{"id":"4-59","name":"リユニオン","imageUrl":"https://one-draw.jp/ijinden/cardlist/004/card/04_059.png","expansion":45,"type":3,"level":5,"color":16,"term":0,"trait":0,"legacy":1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69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JSON.$A$1];[.$C369];[$JSON.$B$1];[.$E369];[$JSON.$C$1];[.$T369];[$JSON.$D$1];[.$G369];[$JSON.$E$1];[.$I369];[$JSON.$F$1];[.$L369];[$JSON.$G$1];[.$K369];[$JSON.$H$1];[.$O369];[$JSON.$I$1];[.$Q369];[$JSON.$J$1];[.$S369];[$JSON.$K$1];[.$A369];[$JSON.$L$1];[.$B369];[$JSON.$M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level&quot;:7,&quot;color&quot;:16,&quot;term&quot;:0,&quot;trait&quot;:0,&quot;legacy&quot;:5,&quot;orderTable&quot;:369,&quot;orderDeck&quot;:335}," calcext:value-type="string">
            <text:p>{"id":"4-60","name":"ドッペルゲンガー","imageUrl":"https://one-draw.jp/ijinden/cardlist/004/card/04_060.png","expansion":45,"type":3,"level":7,"color":16,"term":0,"trait":0,"legacy":5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0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JSON.$A$1];[.$C370];[$JSON.$B$1];[.$E370];[$JSON.$C$1];[.$T370];[$JSON.$D$1];[.$G370];[$JSON.$E$1];[.$I370];[$JSON.$F$1];[.$L370];[$JSON.$G$1];[.$K370];[$JSON.$H$1];[.$O370];[$JSON.$I$1];[.$Q370];[$JSON.$J$1];[.$S370];[$JSON.$K$1];[.$A370];[$JSON.$L$1];[.$B370];[$JSON.$M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level&quot;:1,&quot;color&quot;:64,&quot;term&quot;:48,&quot;trait&quot;:0,&quot;legacy&quot;:2,&quot;orderTable&quot;:370,&quot;orderDeck&quot;:287}," calcext:value-type="string">
            <text:p>{"id":"4-61","name":"ソリッドビジョンα","imageUrl":"https://one-draw.jp/ijinden/cardlist/004/card/04_061.png","expansion":45,"type":3,"level":1,"color":64,"term":48,"trait":0,"legacy":2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1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JSON.$A$1];[.$C371];[$JSON.$B$1];[.$E371];[$JSON.$C$1];[.$T371];[$JSON.$D$1];[.$G371];[$JSON.$E$1];[.$I371];[$JSON.$F$1];[.$L371];[$JSON.$G$1];[.$K371];[$JSON.$H$1];[.$O371];[$JSON.$I$1];[.$Q371];[$JSON.$J$1];[.$S371];[$JSON.$K$1];[.$A371];[$JSON.$L$1];[.$B371];[$JSON.$M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level&quot;:1,&quot;color&quot;:64,&quot;term&quot;:80,&quot;trait&quot;:0,&quot;legacy&quot;:2,&quot;orderTable&quot;:371,&quot;orderDeck&quot;:288}," calcext:value-type="string">
            <text:p>{"id":"4-62","name":"ソリッドビジョンδ","imageUrl":"https://one-draw.jp/ijinden/cardlist/004/card/04_062.png","expansion":45,"type":3,"level":1,"color":64,"term":80,"trait":0,"legacy":2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2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JSON.$A$1];[.$C372];[$JSON.$B$1];[.$E372];[$JSON.$C$1];[.$T372];[$JSON.$D$1];[.$G372];[$JSON.$E$1];[.$I372];[$JSON.$F$1];[.$L372];[$JSON.$G$1];[.$K372];[$JSON.$H$1];[.$O372];[$JSON.$I$1];[.$Q372];[$JSON.$J$1];[.$S372];[$JSON.$K$1];[.$A372];[$JSON.$L$1];[.$B372];[$JSON.$M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level&quot;:1,&quot;color&quot;:64,&quot;term&quot;:144,&quot;trait&quot;:0,&quot;legacy&quot;:2,&quot;orderTable&quot;:372,&quot;orderDeck&quot;:289}," calcext:value-type="string">
            <text:p>{"id":"4-63","name":"ソリッドビジョンΩ","imageUrl":"https://one-draw.jp/ijinden/cardlist/004/card/04_063.png","expansion":45,"type":3,"level":1,"color":64,"term":144,"trait":0,"legacy":2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3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JSON.$A$1];[.$C373];[$JSON.$B$1];[.$E373];[$JSON.$C$1];[.$T373];[$JSON.$D$1];[.$G373];[$JSON.$E$1];[.$I373];[$JSON.$F$1];[.$L373];[$JSON.$G$1];[.$K373];[$JSON.$H$1];[.$O373];[$JSON.$I$1];[.$Q373];[$JSON.$J$1];[.$S373];[$JSON.$K$1];[.$A373];[$JSON.$L$1];[.$B373];[$JSON.$M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level&quot;:1,&quot;color&quot;:64,&quot;term&quot;:272,&quot;trait&quot;:0,&quot;legacy&quot;:2,&quot;orderTable&quot;:373,&quot;orderDeck&quot;:290}," calcext:value-type="string">
            <text:p>{"id":"4-64","name":"ソリッドビジョンβ","imageUrl":"https://one-draw.jp/ijinden/cardlist/004/card/04_064.png","expansion":45,"type":3,"level":1,"color":64,"term":272,"trait":0,"legacy":2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冥府発動</text:p>
          </table:table-cell>
          <table:table-cell table:formula="of:=IFERROR(VLOOKUP([.$R374];[$遺業能力番号.$A$1:$遺業能力番号.$B$9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JSON.$A$1];[.$C374];[$JSON.$B$1];[.$E374];[$JSON.$C$1];[.$T374];[$JSON.$D$1];[.$G374];[$JSON.$E$1];[.$I374];[$JSON.$F$1];[.$L374];[$JSON.$G$1];[.$K374];[$JSON.$H$1];[.$O374];[$JSON.$I$1];[.$Q374];[$JSON.$J$1];[.$S374];[$JSON.$K$1];[.$A374];[$JSON.$L$1];[.$B374];[$JSON.$M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level&quot;:1,&quot;color&quot;:64,&quot;term&quot;:528,&quot;trait&quot;:0,&quot;legacy&quot;:2,&quot;orderTable&quot;:374,&quot;orderDeck&quot;:291}," calcext:value-type="string">
            <text:p>{"id":"4-65","name":"ソリッドビジョンγ","imageUrl":"https://one-draw.jp/ijinden/cardlist/004/card/04_065.png","expansion":45,"type":3,"level":1,"color":64,"term":528,"trait":0,"legacy":2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5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JSON.$A$1];[.$C375];[$JSON.$B$1];[.$E375];[$JSON.$C$1];[.$T375];[$JSON.$D$1];[.$G375];[$JSON.$E$1];[.$I375];[$JSON.$F$1];[.$L375];[$JSON.$G$1];[.$K375];[$JSON.$H$1];[.$O375];[$JSON.$I$1];[.$Q375];[$JSON.$J$1];[.$S375];[$JSON.$K$1];[.$A375];[$JSON.$L$1];[.$B375];[$JSON.$M$1])" office:value-type="string" office:string-value="{&quot;id&quot;:&quot;4-66&quot;,&quot;name&quot;:&quot;遁甲式烈火&quot;,&quot;imageUrl&quot;:&quot;https://one-draw.jp/ijinden/cardlist/004/card/04_066.png&quot;,&quot;expansion&quot;:45,&quot;type&quot;:4,&quot;level&quot;:1,&quot;color&quot;:1,&quot;term&quot;:0,&quot;trait&quot;:0,&quot;legacy&quot;:9,&quot;orderTable&quot;:375,&quot;orderDeck&quot;:348}," calcext:value-type="string">
            <text:p>{"id":"4-66","name":"遁甲式烈火","imageUrl":"https://one-draw.jp/ijinden/cardlist/004/card/04_066.png","expansion":45,"type":4,"level":1,"color":1,"term":0,"trait":0,"legacy":9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76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JSON.$A$1];[.$C376];[$JSON.$B$1];[.$E376];[$JSON.$C$1];[.$T376];[$JSON.$D$1];[.$G376];[$JSON.$E$1];[.$I376];[$JSON.$F$1];[.$L376];[$JSON.$G$1];[.$K376];[$JSON.$H$1];[.$O376];[$JSON.$I$1];[.$Q376];[$JSON.$J$1];[.$S376];[$JSON.$K$1];[.$A376];[$JSON.$L$1];[.$B376];[$JSON.$M$1])" office:value-type="string" office:string-value="{&quot;id&quot;:&quot;4-67&quot;,&quot;name&quot;:&quot;レッドサークル&quot;,&quot;imageUrl&quot;:&quot;https://one-draw.jp/ijinden/cardlist/004/card/04_067.png&quot;,&quot;expansion&quot;:45,&quot;type&quot;:4,&quot;level&quot;:0,&quot;color&quot;:1,&quot;term&quot;:0,&quot;trait&quot;:0,&quot;legacy&quot;:5,&quot;orderTable&quot;:376,&quot;orderDeck&quot;:337}," calcext:value-type="string">
            <text:p>{"id":"4-67","name":"レッドサークル","imageUrl":"https://one-draw.jp/ijinden/cardlist/004/card/04_067.png","expansion":45,"type":4,"level":0,"color":1,"term":0,"trait":0,"legacy":5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7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JSON.$A$1];[.$C377];[$JSON.$B$1];[.$E377];[$JSON.$C$1];[.$T377];[$JSON.$D$1];[.$G377];[$JSON.$E$1];[.$I377];[$JSON.$F$1];[.$L377];[$JSON.$G$1];[.$K377];[$JSON.$H$1];[.$O377];[$JSON.$I$1];[.$Q377];[$JSON.$J$1];[.$S377];[$JSON.$K$1];[.$A377];[$JSON.$L$1];[.$B377];[$JSON.$M$1])" office:value-type="string" office:string-value="{&quot;id&quot;:&quot;4-68&quot;,&quot;name&quot;:&quot;遁甲式水鏡&quot;,&quot;imageUrl&quot;:&quot;https://one-draw.jp/ijinden/cardlist/004/card/04_068.png&quot;,&quot;expansion&quot;:45,&quot;type&quot;:4,&quot;level&quot;:1,&quot;color&quot;:2,&quot;term&quot;:0,&quot;trait&quot;:0,&quot;legacy&quot;:9,&quot;orderTable&quot;:377,&quot;orderDeck&quot;:354}," calcext:value-type="string">
            <text:p>{"id":"4-68","name":"遁甲式水鏡","imageUrl":"https://one-draw.jp/ijinden/cardlist/004/card/04_068.png","expansion":45,"type":4,"level":1,"color":2,"term":0,"trait":0,"legacy":9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78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JSON.$A$1];[.$C378];[$JSON.$B$1];[.$E378];[$JSON.$C$1];[.$T378];[$JSON.$D$1];[.$G378];[$JSON.$E$1];[.$I378];[$JSON.$F$1];[.$L378];[$JSON.$G$1];[.$K378];[$JSON.$H$1];[.$O378];[$JSON.$I$1];[.$Q378];[$JSON.$J$1];[.$S378];[$JSON.$K$1];[.$A378];[$JSON.$L$1];[.$B378];[$JSON.$M$1])" office:value-type="string" office:string-value="{&quot;id&quot;:&quot;4-69&quot;,&quot;name&quot;:&quot;ブルーサークル&quot;,&quot;imageUrl&quot;:&quot;https://one-draw.jp/ijinden/cardlist/004/card/04_069.png&quot;,&quot;expansion&quot;:45,&quot;type&quot;:4,&quot;level&quot;:0,&quot;color&quot;:2,&quot;term&quot;:0,&quot;trait&quot;:0,&quot;legacy&quot;:5,&quot;orderTable&quot;:378,&quot;orderDeck&quot;:338}," calcext:value-type="string">
            <text:p>{"id":"4-69","name":"ブルーサークル","imageUrl":"https://one-draw.jp/ijinden/cardlist/004/card/04_069.png","expansion":45,"type":4,"level":0,"color":2,"term":0,"trait":0,"legacy":5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喪神</text:p>
          </table:table-cell>
          <table:table-cell table:formula="of:=IFERROR(VLOOKUP([.$R379];[$遺業能力番号.$A$1:$遺業能力番号.$B$9];2;0);0)" office:value-type="float" office:value="9" calcext:value-type="float">
            <text:p>9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JSON.$A$1];[.$C379];[$JSON.$B$1];[.$E379];[$JSON.$C$1];[.$T379];[$JSON.$D$1];[.$G379];[$JSON.$E$1];[.$I379];[$JSON.$F$1];[.$L379];[$JSON.$G$1];[.$K379];[$JSON.$H$1];[.$O379];[$JSON.$I$1];[.$Q379];[$JSON.$J$1];[.$S379];[$JSON.$K$1];[.$A379];[$JSON.$L$1];[.$B379];[$JSON.$M$1])" office:value-type="string" office:string-value="{&quot;id&quot;:&quot;4-70&quot;,&quot;name&quot;:&quot;遁甲式木蓮&quot;,&quot;imageUrl&quot;:&quot;https://one-draw.jp/ijinden/cardlist/004/card/04_070.png&quot;,&quot;expansion&quot;:45,&quot;type&quot;:4,&quot;level&quot;:1,&quot;color&quot;:4,&quot;term&quot;:0,&quot;trait&quot;:0,&quot;legacy&quot;:9,&quot;orderTable&quot;:379,&quot;orderDeck&quot;:360}," calcext:value-type="string">
            <text:p>{"id":"4-70","name":"遁甲式木蓮","imageUrl":"https://one-draw.jp/ijinden/cardlist/004/card/04_070.png","expansion":45,"type":4,"level":1,"color":4,"term":0,"trait":0,"legacy":9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0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0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JSON.$A$1];[.$C380];[$JSON.$B$1];[.$E380];[$JSON.$C$1];[.$T380];[$JSON.$D$1];[.$G380];[$JSON.$E$1];[.$I380];[$JSON.$F$1];[.$L380];[$JSON.$G$1];[.$K380];[$JSON.$H$1];[.$O380];[$JSON.$I$1];[.$Q380];[$JSON.$J$1];[.$S380];[$JSON.$K$1];[.$A380];[$JSON.$L$1];[.$B380];[$JSON.$M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level&quot;:0,&quot;color&quot;:4,&quot;term&quot;:0,&quot;trait&quot;:0,&quot;legacy&quot;:5,&quot;orderTable&quot;:380,&quot;orderDeck&quot;:339}," calcext:value-type="string">
            <text:p>{"id":"4-71","name":"グリーンサークル","imageUrl":"https://one-draw.jp/ijinden/cardlist/004/card/04_071.png","expansion":45,"type":4,"level":0,"color":4,"term":0,"trait":0,"legacy":5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1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1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JSON.$A$1];[.$C381];[$JSON.$B$1];[.$E381];[$JSON.$C$1];[.$T381];[$JSON.$D$1];[.$G381];[$JSON.$E$1];[.$I381];[$JSON.$F$1];[.$L381];[$JSON.$G$1];[.$K381];[$JSON.$H$1];[.$O381];[$JSON.$I$1];[.$Q381];[$JSON.$J$1];[.$S381];[$JSON.$K$1];[.$A381];[$JSON.$L$1];[.$B381];[$JSON.$M$1])" office:value-type="string" office:string-value="{&quot;id&quot;:&quot;4-72&quot;,&quot;name&quot;:&quot;ラ・コロール&quot;,&quot;imageUrl&quot;:&quot;https://one-draw.jp/ijinden/cardlist/004/card/04_072.png&quot;,&quot;expansion&quot;:45,&quot;type&quot;:4,&quot;level&quot;:1,&quot;color&quot;:8,&quot;term&quot;:0,&quot;trait&quot;:0,&quot;legacy&quot;:3,&quot;orderTable&quot;:381,&quot;orderDeck&quot;:365}," calcext:value-type="string">
            <text:p>{"id":"4-72","name":"ラ・コロール","imageUrl":"https://one-draw.jp/ijinden/cardlist/004/card/04_072.png","expansion":45,"type":4,"level":1,"color":8,"term":0,"trait":0,"legacy":3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2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2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JSON.$A$1];[.$C382];[$JSON.$B$1];[.$E382];[$JSON.$C$1];[.$T382];[$JSON.$D$1];[.$G382];[$JSON.$E$1];[.$I382];[$JSON.$F$1];[.$L382];[$JSON.$G$1];[.$K382];[$JSON.$H$1];[.$O382];[$JSON.$I$1];[.$Q382];[$JSON.$J$1];[.$S382];[$JSON.$K$1];[.$A382];[$JSON.$L$1];[.$B382];[$JSON.$M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level&quot;:0,&quot;color&quot;:8,&quot;term&quot;:0,&quot;trait&quot;:0,&quot;legacy&quot;:5,&quot;orderTable&quot;:382,&quot;orderDeck&quot;:340}," calcext:value-type="string">
            <text:p>{"id":"4-73","name":"イエローサークル","imageUrl":"https://one-draw.jp/ijinden/cardlist/004/card/04_073.png","expansion":45,"type":4,"level":0,"color":8,"term":0,"trait":0,"legacy":5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3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3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JSON.$A$1];[.$C383];[$JSON.$B$1];[.$E383];[$JSON.$C$1];[.$T383];[$JSON.$D$1];[.$G383];[$JSON.$E$1];[.$I383];[$JSON.$F$1];[.$L383];[$JSON.$G$1];[.$K383];[$JSON.$H$1];[.$O383];[$JSON.$I$1];[.$Q383];[$JSON.$J$1];[.$S383];[$JSON.$K$1];[.$A383];[$JSON.$L$1];[.$B383];[$JSON.$M$1])" office:value-type="string" office:string-value="{&quot;id&quot;:&quot;4-74&quot;,&quot;name&quot;:&quot;ディ・クローネ&quot;,&quot;imageUrl&quot;:&quot;https://one-draw.jp/ijinden/cardlist/004/card/04_074.png&quot;,&quot;expansion&quot;:45,&quot;type&quot;:4,&quot;level&quot;:1,&quot;color&quot;:16,&quot;term&quot;:0,&quot;trait&quot;:0,&quot;legacy&quot;:3,&quot;orderTable&quot;:383,&quot;orderDeck&quot;:371}," calcext:value-type="string">
            <text:p>{"id":"4-74","name":"ディ・クローネ","imageUrl":"https://one-draw.jp/ijinden/cardlist/004/card/04_074.png","expansion":45,"type":4,"level":1,"color":16,"term":0,"trait":0,"legacy":3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4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手札に戻す</text:p>
          </table:table-cell>
          <table:table-cell table:formula="of:=IFERROR(VLOOKUP([.$R384];[$遺業能力番号.$A$1:$遺業能力番号.$B$9];2;0);0)" office:value-type="float" office:value="5" calcext:value-type="float">
            <text:p>5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JSON.$A$1];[.$C384];[$JSON.$B$1];[.$E384];[$JSON.$C$1];[.$T384];[$JSON.$D$1];[.$G384];[$JSON.$E$1];[.$I384];[$JSON.$F$1];[.$L384];[$JSON.$G$1];[.$K384];[$JSON.$H$1];[.$O384];[$JSON.$I$1];[.$Q384];[$JSON.$J$1];[.$S384];[$JSON.$K$1];[.$A384];[$JSON.$L$1];[.$B384];[$JSON.$M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level&quot;:0,&quot;color&quot;:16,&quot;term&quot;:0,&quot;trait&quot;:0,&quot;legacy&quot;:5,&quot;orderTable&quot;:384,&quot;orderDeck&quot;:341}," calcext:value-type="string">
            <text:p>{"id":"4-75","name":"パープルサークル","imageUrl":"https://one-draw.jp/ijinden/cardlist/004/card/04_075.png","expansion":45,"type":4,"level":0,"color":16,"term":0,"trait":0,"legacy":5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5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1ドローする</text:p>
          </table:table-cell>
          <table:table-cell table:formula="of:=IFERROR(VLOOKUP([.$R385];[$遺業能力番号.$A$1:$遺業能力番号.$B$9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JSON.$A$1];[.$C385];[$JSON.$B$1];[.$E385];[$JSON.$C$1];[.$T385];[$JSON.$D$1];[.$G385];[$JSON.$E$1];[.$I385];[$JSON.$F$1];[.$L385];[$JSON.$G$1];[.$K385];[$JSON.$H$1];[.$O385];[$JSON.$I$1];[.$Q385];[$JSON.$J$1];[.$S385];[$JSON.$K$1];[.$A385];[$JSON.$L$1];[.$B385];[$JSON.$M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level&quot;:1,&quot;color&quot;:64,&quot;term&quot;:0,&quot;trait&quot;:0,&quot;legacy&quot;:4,&quot;orderTable&quot;:385,&quot;orderDeck&quot;:377}," calcext:value-type="string">
            <text:p>{"id":"4-76","name":"トランスポーター","imageUrl":"https://one-draw.jp/ijinden/cardlist/004/card/04_076.png","expansion":45,"type":4,"level":1,"color":64,"term":0,"trait":0,"legacy":4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6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6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JSON.$A$1];[.$C386];[$JSON.$B$1];[.$E386];[$JSON.$C$1];[.$T386];[$JSON.$D$1];[.$G386];[$JSON.$E$1];[.$I386];[$JSON.$F$1];[.$L386];[$JSON.$G$1];[.$K386];[$JSON.$H$1];[.$O386];[$JSON.$I$1];[.$Q386];[$JSON.$J$1];[.$S386];[$JSON.$K$1];[.$A386];[$JSON.$L$1];[.$B386];[$JSON.$M$1])" office:value-type="string" office:string-value="{&quot;id&quot;:&quot;4-77&quot;,&quot;name&quot;:&quot;アセイミー&quot;,&quot;imageUrl&quot;:&quot;https://one-draw.jp/ijinden/cardlist/004/card/04_077.png&quot;,&quot;expansion&quot;:45,&quot;type&quot;:4,&quot;level&quot;:2,&quot;color&quot;:64,&quot;term&quot;:0,&quot;trait&quot;:0,&quot;legacy&quot;:3,&quot;orderTable&quot;:386,&quot;orderDeck&quot;:387}," calcext:value-type="string">
            <text:p>{"id":"4-77","name":"アセイミー","imageUrl":"https://one-draw.jp/ijinden/cardlist/004/card/04_077.png","expansion":45,"type":4,"level":2,"color":64,"term":0,"trait":0,"legacy":3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7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復元</text:p>
          </table:table-cell>
          <table:table-cell table:formula="of:=IFERROR(VLOOKUP([.$R387];[$遺業能力番号.$A$1:$遺業能力番号.$B$9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JSON.$A$1];[.$C387];[$JSON.$B$1];[.$E387];[$JSON.$C$1];[.$T387];[$JSON.$D$1];[.$G387];[$JSON.$E$1];[.$I387];[$JSON.$F$1];[.$L387];[$JSON.$G$1];[.$K387];[$JSON.$H$1];[.$O387];[$JSON.$I$1];[.$Q387];[$JSON.$J$1];[.$S387];[$JSON.$K$1];[.$A387];[$JSON.$L$1];[.$B387];[$JSON.$M$1])" office:value-type="string" office:string-value="{&quot;id&quot;:&quot;4-78&quot;,&quot;name&quot;:&quot;ホプロン&quot;,&quot;imageUrl&quot;:&quot;https://one-draw.jp/ijinden/cardlist/004/card/04_078.png&quot;,&quot;expansion&quot;:45,&quot;type&quot;:4,&quot;level&quot;:2,&quot;color&quot;:64,&quot;term&quot;:0,&quot;trait&quot;:0,&quot;legacy&quot;:3,&quot;orderTable&quot;:387,&quot;orderDeck&quot;:388}," calcext:value-type="string">
            <text:p>{"id":"4-78","name":"ホプロン","imageUrl":"https://one-draw.jp/ijinden/cardlist/004/card/04_078.png","expansion":45,"type":4,"level":2,"color":64,"term":0,"trait":0,"legacy":3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8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88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JSON.$A$1];[.$C388];[$JSON.$B$1];[.$E388];[$JSON.$C$1];[.$T388];[$JSON.$D$1];[.$G388];[$JSON.$E$1];[.$I388];[$JSON.$F$1];[.$L388];[$JSON.$G$1];[.$K388];[$JSON.$H$1];[.$O388];[$JSON.$I$1];[.$Q388];[$JSON.$J$1];[.$S388];[$JSON.$K$1];[.$A388];[$JSON.$L$1];[.$B388];[$JSON.$M$1])" office:value-type="string" office:string-value="{&quot;id&quot;:&quot;4-79&quot;,&quot;name&quot;:&quot;ピクシーダスト&quot;,&quot;imageUrl&quot;:&quot;https://one-draw.jp/ijinden/cardlist/004/card/04_079.png&quot;,&quot;expansion&quot;:45,&quot;type&quot;:4,&quot;level&quot;:1,&quot;color&quot;:64,&quot;term&quot;:0,&quot;trait&quot;:0,&quot;legacy&quot;:1,&quot;orderTable&quot;:388,&quot;orderDeck&quot;:378}," calcext:value-type="string">
            <text:p>{"id":"4-79","name":"ピクシーダスト","imageUrl":"https://one-draw.jp/ijinden/cardlist/004/card/04_079.png","expansion":45,"type":4,"level":1,"color":64,"term":0,"trait":0,"legacy":1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9];[$特性番号.$A$1:$特性番号.$B$8];2;0);0)" office:value-type="float" office:value="0" calcext:value-type="float">
            <text:p>0</text:p>
          </table:table-cell>
          <table:table-cell table:style-name="ce8" office:value-type="string" calcext:value-type="string">
            <text:p>魔力化</text:p>
          </table:table-cell>
          <table:table-cell table:formula="of:=IFERROR(VLOOKUP([.$R389];[$遺業能力番号.$A$1:$遺業能力番号.$B$9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JSON.$A$1];[.$C389];[$JSON.$B$1];[.$E389];[$JSON.$C$1];[.$T389];[$JSON.$D$1];[.$G389];[$JSON.$E$1];[.$I389];[$JSON.$F$1];[.$L389];[$JSON.$G$1];[.$K389];[$JSON.$H$1];[.$O389];[$JSON.$I$1];[.$Q389];[$JSON.$J$1];[.$S389];[$JSON.$K$1];[.$A389];[$JSON.$L$1];[.$B389];[$JSON.$M$1])" office:value-type="string" office:string-value="{&quot;id&quot;:&quot;4-80&quot;,&quot;name&quot;:&quot;カルドロン&quot;,&quot;imageUrl&quot;:&quot;https://one-draw.jp/ijinden/cardlist/004/card/04_080.png&quot;,&quot;expansion&quot;:45,&quot;type&quot;:4,&quot;level&quot;:2,&quot;color&quot;:64,&quot;term&quot;:0,&quot;trait&quot;:0,&quot;legacy&quot;:1,&quot;orderTable&quot;:389,&quot;orderDeck&quot;:389}," calcext:value-type="string">
            <text:p>{"id":"4-80","name":"カルドロン","imageUrl":"https://one-draw.jp/ijinden/cardlist/004/card/04_080.png","expansion":45,"type":4,"level":2,"color":64,"term":0,"trait":0,"legacy":1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8"/>
        </table:table-row>
        <table:table-row table:style-name="ro2">
          <table:table-cell table:number-columns-repeated="16368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特性番号" table:style-name="ta1">
        <table:table-column table:style-name="co1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剣術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術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音楽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美術_思想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医術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志願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剣術_志願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遺業能力番号" table:style-name="ta1">
        <table:table-column table:style-name="co16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魔力化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冥府発動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復元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ドローする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手札に戻す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反魂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山札の上か下に戻す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木霊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喪神</text:p>
          </table:table-cell>
          <table:table-cell office:value-type="float" office:value="9" calcext:value-type="float">
            <text:p>9</text:p>
          </table:table-cell>
        </table:table-row>
      </table:table>
      <table:table table:name="JSON" table:style-name="ta1">
        <table:table-column table:style-name="co13" table:number-columns-repeated="13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<text:span text:style-name="T1">,"trait"</text:span>:</text:p>
          </table:table-cell>
          <table:table-cell office:value-type="string" calcext:value-type="string">
            <text:p><text:span text:style-name="T1">,"legacy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table:table-column table:style-name="co13" table:default-cell-style-name="Default"/>
        <table:table-row table:style-name="ro3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3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U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00/00/00</text:date>, <text:time style:data-style-name="N2" text:time-value="23:24:24.59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4-20T23:25:52.604000000</dc:date>
    <meta:editing-duration>PT9H40M59S</meta:editing-duration>
    <meta:editing-cycles>425</meta:editing-cycles>
    <meta:generator>LibreOffice/7.5.3.2$Windows_X86_64 LibreOffice_project/9f56dff12ba03b9acd7730a5a481eea045e468f3</meta:generator>
    <meta:document-statistic meta:table-count="9" meta:cell-count="8284" meta:object-count="0"/>
  </office:meta>
</office:document-meta>
</file>