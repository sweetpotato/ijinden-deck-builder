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857cm"/>
    </style:style>
    <style:style style:name="co13" style:family="table-column">
      <style:table-column-properties fo:break-before="auto" style:column-width="1.069cm"/>
    </style:style>
    <style:style style:name="co14" style:family="table-column">
      <style:table-column-properties fo:break-before="auto" style:column-width="7.458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13" table:default-cell-style-name="ce6"/>
        <table:table-column table:style-name="co3" table:default-cell-style-name="ce19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48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P2];[$HTML.$D$1];[.$G2];[$HTML.$E$1];[.$I2];[$HTML.$F$1];[.$K2];[$HTML.$G$1];[.$O2];[$HTML.$H$1];[.$A2];[$HTML.$I$1];[.$B2];[$HTML.$J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48}," calcext:value-type="string">
            <text:p>{"id":"R-1","name":"上杉謙信","imageUrl":"https://one-draw.jp/ijinden/cardlist/R01/card/R_001.png","expansion":10,"type":1,"color":1,"term":0,"orderTable":1,"orderDeck":148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P3];[$HTML.$D$1];[.$G3];[$HTML.$E$1];[.$I3];[$HTML.$F$1];[.$K3];[$HTML.$G$1];[.$O3];[$HTML.$H$1];[.$A3];[$HTML.$I$1];[.$B3];[$HTML.$J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P4];[$HTML.$D$1];[.$G4];[$HTML.$E$1];[.$I4];[$HTML.$F$1];[.$K4];[$HTML.$G$1];[.$O4];[$HTML.$H$1];[.$A4];[$HTML.$I$1];[.$B4];[$HTML.$J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2}," calcext:value-type="string">
            <text:p>{"id":"R-3","name":"武田勝頼","imageUrl":"https://one-draw.jp/ijinden/cardlist/R01/card/R_003.png","expansion":10,"type":1,"color":1,"term":0,"orderTable":3,"orderDeck":22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P5];[$HTML.$D$1];[.$G5];[$HTML.$E$1];[.$I5];[$HTML.$F$1];[.$K5];[$HTML.$G$1];[.$O5];[$HTML.$H$1];[.$A5];[$HTML.$I$1];[.$B5];[$HTML.$J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52}," calcext:value-type="string">
            <text:p>{"id":"R-4","name":"ヴラド・ツェペシュ","imageUrl":"https://one-draw.jp/ijinden/cardlist/R01/card/R_004.png","expansion":10,"type":1,"color":1,"term":0,"orderTable":4,"orderDeck":52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P6];[$HTML.$D$1];[.$G6];[$HTML.$E$1];[.$I6];[$HTML.$F$1];[.$K6];[$HTML.$G$1];[.$O6];[$HTML.$H$1];[.$A6];[$HTML.$I$1];[.$B6];[$HTML.$J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87}," calcext:value-type="string">
            <text:p>{"id":"R-5","name":"坂上田村麻呂","imageUrl":"https://one-draw.jp/ijinden/cardlist/R01/card/R_005.png","expansion":10,"type":1,"color":1,"term":0,"orderTable":5,"orderDeck":87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P7];[$HTML.$D$1];[.$G7];[$HTML.$E$1];[.$I7];[$HTML.$F$1];[.$K7];[$HTML.$G$1];[.$O7];[$HTML.$H$1];[.$A7];[$HTML.$I$1];[.$B7];[$HTML.$J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18}," calcext:value-type="string">
            <text:p>{"id":"R-6","name":"楠木正成","imageUrl":"https://one-draw.jp/ijinden/cardlist/R01/card/R_006.png","expansion":10,"type":1,"color":1,"term":0,"orderTable":6,"orderDeck":118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P8];[$HTML.$D$1];[.$G8];[$HTML.$E$1];[.$I8];[$HTML.$F$1];[.$K8];[$HTML.$G$1];[.$O8];[$HTML.$H$1];[.$A8];[$HTML.$I$1];[.$B8];[$HTML.$J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19}," calcext:value-type="string">
            <text:p>{"id":"R-7","name":"ジェームズ・バトラー・ヒコック","imageUrl":"https://one-draw.jp/ijinden/cardlist/R01/card/R_007.png","expansion":10,"type":1,"color":1,"term":0,"orderTable":7,"orderDeck":119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P9];[$HTML.$D$1];[.$G9];[$HTML.$E$1];[.$I9];[$HTML.$F$1];[.$K9];[$HTML.$G$1];[.$O9];[$HTML.$H$1];[.$A9];[$HTML.$I$1];[.$B9];[$HTML.$J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49}," calcext:value-type="string">
            <text:p>{"id":"R-8","name":"アレクサンドロス大王","imageUrl":"https://one-draw.jp/ijinden/cardlist/R01/card/R_008.png","expansion":10,"type":1,"color":1,"term":0,"orderTable":8,"orderDeck":149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P10];[$HTML.$D$1];[.$G10];[$HTML.$E$1];[.$I10];[$HTML.$F$1];[.$K10];[$HTML.$G$1];[.$O10];[$HTML.$H$1];[.$A10];[$HTML.$I$1];[.$B10];[$HTML.$J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196}," calcext:value-type="string">
            <text:p>{"id":"R-9","name":"神剣眠る氏社","imageUrl":"https://one-draw.jp/ijinden/cardlist/R01/card/R_009.png","expansion":10,"type":2,"color":1,"term":0,"orderTable":9,"orderDeck":196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P11];[$HTML.$D$1];[.$G11];[$HTML.$E$1];[.$I11];[$HTML.$F$1];[.$K11];[$HTML.$G$1];[.$O11];[$HTML.$H$1];[.$A11];[$HTML.$I$1];[.$B11];[$HTML.$J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04}," calcext:value-type="string">
            <text:p>{"id":"R-10","name":"連なる天守閣","imageUrl":"https://one-draw.jp/ijinden/cardlist/R01/card/R_010.png","expansion":10,"type":2,"color":1,"term":0,"orderTable":10,"orderDeck":204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P12];[$HTML.$D$1];[.$G12];[$HTML.$E$1];[.$I12];[$HTML.$F$1];[.$K12];[$HTML.$G$1];[.$O12];[$HTML.$H$1];[.$A12];[$HTML.$I$1];[.$B12];[$HTML.$J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244}," calcext:value-type="string">
            <text:p>{"id":"R-11","name":"ロイヤリティ","imageUrl":"https://one-draw.jp/ijinden/cardlist/R01/card/R_011.png","expansion":10,"type":3,"color":1,"term":0,"orderTable":11,"orderDeck":24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P13];[$HTML.$D$1];[.$G13];[$HTML.$E$1];[.$I13];[$HTML.$F$1];[.$K13];[$HTML.$G$1];[.$O13];[$HTML.$H$1];[.$A13];[$HTML.$I$1];[.$B13];[$HTML.$J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245}," calcext:value-type="string">
            <text:p>{"id":"R-12","name":"デスペラード","imageUrl":"https://one-draw.jp/ijinden/cardlist/R01/card/R_012.png","expansion":10,"type":3,"color":1,"term":0,"orderTable":12,"orderDeck":24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P14];[$HTML.$D$1];[.$G14];[$HTML.$E$1];[.$I14];[$HTML.$F$1];[.$K14];[$HTML.$G$1];[.$O14];[$HTML.$H$1];[.$A14];[$HTML.$I$1];[.$B14];[$HTML.$J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271}," calcext:value-type="string">
            <text:p>{"id":"R-13","name":"レッドストーン","imageUrl":"https://one-draw.jp/ijinden/cardlist/R01/card/R_013.png","expansion":10,"type":4,"color":1,"term":0,"orderTable":13,"orderDeck":271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P15];[$HTML.$D$1];[.$G15];[$HTML.$E$1];[.$I15];[$HTML.$F$1];[.$K15];[$HTML.$G$1];[.$O15];[$HTML.$H$1];[.$A15];[$HTML.$I$1];[.$B15];[$HTML.$J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52}," calcext:value-type="string">
            <text:p>{"id":"B-1","name":"レオナルド・ダ・ヴィンチ","imageUrl":"https://one-draw.jp/ijinden/cardlist/B01/card/B_001.png","expansion":11,"type":1,"color":2,"term":0,"orderTable":14,"orderDeck":152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P16];[$HTML.$D$1];[.$G16];[$HTML.$E$1];[.$I16];[$HTML.$F$1];[.$K16];[$HTML.$G$1];[.$O16];[$HTML.$H$1];[.$A16];[$HTML.$I$1];[.$B16];[$HTML.$J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P17];[$HTML.$D$1];[.$G17];[$HTML.$E$1];[.$I17];[$HTML.$F$1];[.$K17];[$HTML.$G$1];[.$O17];[$HTML.$H$1];[.$A17];[$HTML.$I$1];[.$B17];[$HTML.$J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28}," calcext:value-type="string">
            <text:p>{"id":"B-3","name":"好太王","imageUrl":"https://one-draw.jp/ijinden/cardlist/B01/card/B_003.png","expansion":11,"type":1,"color":2,"term":0,"orderTable":16,"orderDeck":28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P18];[$HTML.$D$1];[.$G18];[$HTML.$E$1];[.$I18];[$HTML.$F$1];[.$K18];[$HTML.$G$1];[.$O18];[$HTML.$H$1];[.$A18];[$HTML.$I$1];[.$B18];[$HTML.$J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62}," calcext:value-type="string">
            <text:p>{"id":"B-4","name":"フェルディナンド・マゼラン","imageUrl":"https://one-draw.jp/ijinden/cardlist/B01/card/B_004.png","expansion":11,"type":1,"color":2,"term":1,"orderTable":17,"orderDeck":62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P19];[$HTML.$D$1];[.$G19];[$HTML.$E$1];[.$I19];[$HTML.$F$1];[.$K19];[$HTML.$G$1];[.$O19];[$HTML.$H$1];[.$A19];[$HTML.$I$1];[.$B19];[$HTML.$J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63}," calcext:value-type="string">
            <text:p>{"id":"B-5","name":"ラファエロ・サンティ","imageUrl":"https://one-draw.jp/ijinden/cardlist/B01/card/B_005.png","expansion":11,"type":1,"color":2,"term":0,"orderTable":18,"orderDeck":63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P20];[$HTML.$D$1];[.$G20];[$HTML.$E$1];[.$I20];[$HTML.$F$1];[.$K20];[$HTML.$G$1];[.$O20];[$HTML.$H$1];[.$A20];[$HTML.$I$1];[.$B20];[$HTML.$J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29}," calcext:value-type="string">
            <text:p>{"id":"B-6","name":"ジャン・カルヴァン","imageUrl":"https://one-draw.jp/ijinden/cardlist/B01/card/B_006.png","expansion":11,"type":1,"color":2,"term":0,"orderTable":19,"orderDeck":29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P21];[$HTML.$D$1];[.$G21];[$HTML.$E$1];[.$I21];[$HTML.$F$1];[.$K21];[$HTML.$G$1];[.$O21];[$HTML.$H$1];[.$A21];[$HTML.$I$1];[.$B21];[$HTML.$J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64}," calcext:value-type="string">
            <text:p>{"id":"B-7","name":"武帝","imageUrl":"https://one-draw.jp/ijinden/cardlist/B01/card/B_007.png","expansion":11,"type":1,"color":2,"term":0,"orderTable":20,"orderDeck":64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P22];[$HTML.$D$1];[.$G22];[$HTML.$E$1];[.$I22];[$HTML.$F$1];[.$K22];[$HTML.$G$1];[.$O22];[$HTML.$H$1];[.$A22];[$HTML.$I$1];[.$B22];[$HTML.$J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27}," calcext:value-type="string">
            <text:p>{"id":"B-8","name":"楊貴妃","imageUrl":"https://one-draw.jp/ijinden/cardlist/B01/card/B_008.png","expansion":11,"type":1,"color":2,"term":0,"orderTable":21,"orderDeck":127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P23];[$HTML.$D$1];[.$G23];[$HTML.$E$1];[.$I23];[$HTML.$F$1];[.$K23];[$HTML.$G$1];[.$O23];[$HTML.$H$1];[.$A23];[$HTML.$I$1];[.$B23];[$HTML.$J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198}," calcext:value-type="string">
            <text:p>{"id":"B-9","name":"モナ・リザ","imageUrl":"https://one-draw.jp/ijinden/cardlist/B01/card/B_009.png","expansion":11,"type":2,"color":2,"term":0,"orderTable":22,"orderDeck":198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P24];[$HTML.$D$1];[.$G24];[$HTML.$E$1];[.$I24];[$HTML.$F$1];[.$K24];[$HTML.$G$1];[.$O24];[$HTML.$H$1];[.$A24];[$HTML.$I$1];[.$B24];[$HTML.$J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06}," calcext:value-type="string">
            <text:p>{"id":"B-10","name":"革命の広場","imageUrl":"https://one-draw.jp/ijinden/cardlist/B01/card/B_010.png","expansion":11,"type":2,"color":2,"term":0,"orderTable":23,"orderDeck":206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P25];[$HTML.$D$1];[.$G25];[$HTML.$E$1];[.$I25];[$HTML.$F$1];[.$K25];[$HTML.$G$1];[.$O25];[$HTML.$H$1];[.$A25];[$HTML.$I$1];[.$B25];[$HTML.$J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247}," calcext:value-type="string">
            <text:p>{"id":"B-11","name":"フリート","imageUrl":"https://one-draw.jp/ijinden/cardlist/B01/card/B_011.png","expansion":11,"type":3,"color":2,"term":0,"orderTable":24,"orderDeck":24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P26];[$HTML.$D$1];[.$G26];[$HTML.$E$1];[.$I26];[$HTML.$F$1];[.$K26];[$HTML.$G$1];[.$O26];[$HTML.$H$1];[.$A26];[$HTML.$I$1];[.$B26];[$HTML.$J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248}," calcext:value-type="string">
            <text:p>{"id":"B-12","name":"ドローイング","imageUrl":"https://one-draw.jp/ijinden/cardlist/B01/card/B_012.png","expansion":11,"type":3,"color":2,"term":0,"orderTable":25,"orderDeck":24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P27];[$HTML.$D$1];[.$G27];[$HTML.$E$1];[.$I27];[$HTML.$F$1];[.$K27];[$HTML.$G$1];[.$O27];[$HTML.$H$1];[.$A27];[$HTML.$I$1];[.$B27];[$HTML.$J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276}," calcext:value-type="string">
            <text:p>{"id":"B-13","name":"ブルーストーン","imageUrl":"https://one-draw.jp/ijinden/cardlist/B01/card/B_013.png","expansion":11,"type":4,"color":2,"term":0,"orderTable":26,"orderDeck":276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P28];[$HTML.$D$1];[.$G28];[$HTML.$E$1];[.$I28];[$HTML.$F$1];[.$K28];[$HTML.$G$1];[.$O28];[$HTML.$H$1];[.$A28];[$HTML.$I$1];[.$B28];[$HTML.$J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35}," calcext:value-type="string">
            <text:p>{"id":"G-1","name":"出雲の阿国","imageUrl":"https://one-draw.jp/ijinden/cardlist/G01/card/G_001.png","expansion":12,"type":1,"color":4,"term":0,"orderTable":27,"orderDeck":135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P29];[$HTML.$D$1];[.$G29];[$HTML.$E$1];[.$I29];[$HTML.$F$1];[.$K29];[$HTML.$G$1];[.$O29];[$HTML.$H$1];[.$A29];[$HTML.$I$1];[.$B29];[$HTML.$J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1}," calcext:value-type="string">
            <text:p>{"id":"G-2","name":"卑弥呼","imageUrl":"https://one-draw.jp/ijinden/cardlist/G01/card/G_002.png","expansion":12,"type":1,"color":4,"term":0,"orderTable":28,"orderDeck":11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P30];[$HTML.$D$1];[.$G30];[$HTML.$E$1];[.$I30];[$HTML.$F$1];[.$K30];[$HTML.$G$1];[.$O30];[$HTML.$H$1];[.$A30];[$HTML.$I$1];[.$B30];[$HTML.$J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70}," calcext:value-type="string">
            <text:p>{"id":"G-3","name":"アテルイ","imageUrl":"https://one-draw.jp/ijinden/cardlist/G01/card/G_003.png","expansion":12,"type":1,"color":4,"term":0,"orderTable":29,"orderDeck":70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P31];[$HTML.$D$1];[.$G31];[$HTML.$E$1];[.$I31];[$HTML.$F$1];[.$K31];[$HTML.$G$1];[.$O31];[$HTML.$H$1];[.$A31];[$HTML.$I$1];[.$B31];[$HTML.$J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38}," calcext:value-type="string">
            <text:p>{"id":"G-4","name":"紀貫之","imageUrl":"https://one-draw.jp/ijinden/cardlist/G01/card/G_004.png","expansion":12,"type":1,"color":4,"term":2,"orderTable":30,"orderDeck":3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P32];[$HTML.$D$1];[.$G32];[$HTML.$E$1];[.$I32];[$HTML.$F$1];[.$K32];[$HTML.$G$1];[.$O32];[$HTML.$H$1];[.$A32];[$HTML.$I$1];[.$B32];[$HTML.$J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02}," calcext:value-type="string">
            <text:p>{"id":"G-5","name":"阿倍仲麻呂","imageUrl":"https://one-draw.jp/ijinden/cardlist/G01/card/G_005.png","expansion":12,"type":1,"color":4,"term":0,"orderTable":31,"orderDeck":102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P33];[$HTML.$D$1];[.$G33];[$HTML.$E$1];[.$I33];[$HTML.$F$1];[.$K33];[$HTML.$G$1];[.$O33];[$HTML.$H$1];[.$A33];[$HTML.$I$1];[.$B33];[$HTML.$J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71}," calcext:value-type="string">
            <text:p>{"id":"G-6","name":"葛飾北斎","imageUrl":"https://one-draw.jp/ijinden/cardlist/G01/card/G_006.png","expansion":12,"type":1,"color":4,"term":0,"orderTable":32,"orderDeck":71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P34];[$HTML.$D$1];[.$G34];[$HTML.$E$1];[.$I34];[$HTML.$F$1];[.$K34];[$HTML.$G$1];[.$O34];[$HTML.$H$1];[.$A34];[$HTML.$I$1];[.$B34];[$HTML.$J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03}," calcext:value-type="string">
            <text:p>{"id":"G-7","name":"藤原定家","imageUrl":"https://one-draw.jp/ijinden/cardlist/G01/card/G_007.png","expansion":12,"type":1,"color":4,"term":2,"orderTable":33,"orderDeck":103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P35];[$HTML.$D$1];[.$G35];[$HTML.$E$1];[.$I35];[$HTML.$F$1];[.$K35];[$HTML.$G$1];[.$O35];[$HTML.$H$1];[.$A35];[$HTML.$I$1];[.$B35];[$HTML.$J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181}," calcext:value-type="string">
            <text:p>{"id":"G-8","name":"最澄","imageUrl":"https://one-draw.jp/ijinden/cardlist/G01/card/G_008.png","expansion":12,"type":1,"color":4,"term":1,"orderTable":34,"orderDeck":18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P36];[$HTML.$D$1];[.$G36];[$HTML.$E$1];[.$I36];[$HTML.$F$1];[.$K36];[$HTML.$G$1];[.$O36];[$HTML.$H$1];[.$A36];[$HTML.$I$1];[.$B36];[$HTML.$J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16}," calcext:value-type="string">
            <text:p>{"id":"G-9","name":"阿弥陀堂","imageUrl":"https://one-draw.jp/ijinden/cardlist/G01/card/G_009.png","expansion":12,"type":2,"color":4,"term":0,"orderTable":35,"orderDeck":216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P37];[$HTML.$D$1];[.$G37];[$HTML.$E$1];[.$I37];[$HTML.$F$1];[.$K37];[$HTML.$G$1];[.$O37];[$HTML.$H$1];[.$A37];[$HTML.$I$1];[.$B37];[$HTML.$J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25}," calcext:value-type="string">
            <text:p>{"id":"G-10","name":"毘盧遮那仏像","imageUrl":"https://one-draw.jp/ijinden/cardlist/G01/card/G_010.png","expansion":12,"type":2,"color":4,"term":0,"orderTable":36,"orderDeck":225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P38];[$HTML.$D$1];[.$G38];[$HTML.$E$1];[.$I38];[$HTML.$F$1];[.$K38];[$HTML.$G$1];[.$O38];[$HTML.$H$1];[.$A38];[$HTML.$I$1];[.$B38];[$HTML.$J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249}," calcext:value-type="string">
            <text:p>{"id":"G-11","name":"グロウ","imageUrl":"https://one-draw.jp/ijinden/cardlist/G01/card/G_011.png","expansion":12,"type":3,"color":4,"term":0,"orderTable":37,"orderDeck":24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P39];[$HTML.$D$1];[.$G39];[$HTML.$E$1];[.$I39];[$HTML.$F$1];[.$K39];[$HTML.$G$1];[.$O39];[$HTML.$H$1];[.$A39];[$HTML.$I$1];[.$B39];[$HTML.$J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263}," calcext:value-type="string">
            <text:p>{"id":"G-12","name":"ギャザリング","imageUrl":"https://one-draw.jp/ijinden/cardlist/G01/card/G_012.png","expansion":12,"type":3,"color":4,"term":0,"orderTable":38,"orderDeck":263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P40];[$HTML.$D$1];[.$G40];[$HTML.$E$1];[.$I40];[$HTML.$F$1];[.$K40];[$HTML.$G$1];[.$O40];[$HTML.$H$1];[.$A40];[$HTML.$I$1];[.$B40];[$HTML.$J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281}," calcext:value-type="string">
            <text:p>{"id":"G-13","name":"グリーンストーン","imageUrl":"https://one-draw.jp/ijinden/cardlist/G01/card/G_013.png","expansion":12,"type":4,"color":4,"term":0,"orderTable":39,"orderDeck":281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P41];[$HTML.$D$1];[.$G41];[$HTML.$E$1];[.$I41];[$HTML.$F$1];[.$K41];[$HTML.$G$1];[.$O41];[$HTML.$H$1];[.$A41];[$HTML.$I$1];[.$B41];[$HTML.$J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88}," calcext:value-type="string">
            <text:p>{"id":"1-1","name":"織田信長","imageUrl":"https://one-draw.jp/ijinden/cardlist/001/card/01_001.png","expansion":15,"type":1,"color":1,"term":0,"orderTable":40,"orderDeck":88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P42];[$HTML.$D$1];[.$G42];[$HTML.$E$1];[.$I42];[$HTML.$F$1];[.$K42];[$HTML.$G$1];[.$O42];[$HTML.$H$1];[.$A42];[$HTML.$I$1];[.$B42];[$HTML.$J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20}," calcext:value-type="string">
            <text:p>{"id":"1-2","name":"クレオパトラ","imageUrl":"https://one-draw.jp/ijinden/cardlist/001/card/01_002.png","expansion":15,"type":1,"color":1,"term":0,"orderTable":41,"orderDeck":120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P43];[$HTML.$D$1];[.$G43];[$HTML.$E$1];[.$I43];[$HTML.$F$1];[.$K43];[$HTML.$G$1];[.$O43];[$HTML.$H$1];[.$A43];[$HTML.$I$1];[.$B43];[$HTML.$J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65}," calcext:value-type="string">
            <text:p>{"id":"1-3","name":"マルティン・ルター","imageUrl":"https://one-draw.jp/ijinden/cardlist/001/card/01_003.png","expansion":15,"type":1,"color":2,"term":0,"orderTable":42,"orderDeck":65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P44];[$HTML.$D$1];[.$G44];[$HTML.$E$1];[.$I44];[$HTML.$F$1];[.$K44];[$HTML.$G$1];[.$O44];[$HTML.$H$1];[.$A44];[$HTML.$I$1];[.$B44];[$HTML.$J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53}," calcext:value-type="string">
            <text:p>{"id":"1-4","name":"クリストファー・コロンブス","imageUrl":"https://one-draw.jp/ijinden/cardlist/001/card/01_004.png","expansion":15,"type":1,"color":2,"term":1,"orderTable":43,"orderDeck":153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P45];[$HTML.$D$1];[.$G45];[$HTML.$E$1];[.$I45];[$HTML.$F$1];[.$K45];[$HTML.$G$1];[.$O45];[$HTML.$H$1];[.$A45];[$HTML.$I$1];[.$B45];[$HTML.$J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170}," calcext:value-type="string">
            <text:p>{"id":"1-5","name":"ヴォルフガング・アマデウス・モーツァルト","imageUrl":"https://one-draw.jp/ijinden/cardlist/001/card/01_005.png","expansion":15,"type":1,"color":4,"term":0,"orderTable":44,"orderDeck":170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P46];[$HTML.$D$1];[.$G46];[$HTML.$E$1];[.$I46];[$HTML.$F$1];[.$K46];[$HTML.$G$1];[.$O46];[$HTML.$H$1];[.$A46];[$HTML.$I$1];[.$B46];[$HTML.$J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182}," calcext:value-type="string">
            <text:p>{"id":"1-6","name":"紫式部","imageUrl":"https://one-draw.jp/ijinden/cardlist/001/card/01_006.png","expansion":15,"type":1,"color":4,"term":2,"orderTable":45,"orderDeck":18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P47];[$HTML.$D$1];[.$G47];[$HTML.$E$1];[.$I47];[$HTML.$F$1];[.$K47];[$HTML.$G$1];[.$O47];[$HTML.$H$1];[.$A47];[$HTML.$I$1];[.$B47];[$HTML.$J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P48];[$HTML.$D$1];[.$G48];[$HTML.$E$1];[.$I48];[$HTML.$F$1];[.$K48];[$HTML.$G$1];[.$O48];[$HTML.$H$1];[.$A48];[$HTML.$I$1];[.$B48];[$HTML.$J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3}," calcext:value-type="string">
            <text:p>{"id":"1-8","name":"明智光秀","imageUrl":"https://one-draw.jp/ijinden/cardlist/001/card/01_008.png","expansion":15,"type":1,"color":1,"term":0,"orderTable":47,"orderDeck":23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P49];[$HTML.$D$1];[.$G49];[$HTML.$E$1];[.$I49];[$HTML.$F$1];[.$K49];[$HTML.$G$1];[.$O49];[$HTML.$H$1];[.$A49];[$HTML.$I$1];[.$B49];[$HTML.$J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4}," calcext:value-type="string">
            <text:p>{"id":"1-9","name":"藤原純友","imageUrl":"https://one-draw.jp/ijinden/cardlist/001/card/01_009.png","expansion":15,"type":1,"color":1,"term":1,"orderTable":48,"orderDeck":24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P50];[$HTML.$D$1];[.$G50];[$HTML.$E$1];[.$I50];[$HTML.$F$1];[.$K50];[$HTML.$G$1];[.$O50];[$HTML.$H$1];[.$A50];[$HTML.$I$1];[.$B50];[$HTML.$J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53}," calcext:value-type="string">
            <text:p>{"id":"1-10","name":"徳川家康","imageUrl":"https://one-draw.jp/ijinden/cardlist/001/card/01_010.png","expansion":15,"type":1,"color":1,"term":0,"orderTable":49,"orderDeck":53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P51];[$HTML.$D$1];[.$G51];[$HTML.$E$1];[.$I51];[$HTML.$F$1];[.$K51];[$HTML.$G$1];[.$O51];[$HTML.$H$1];[.$A51];[$HTML.$I$1];[.$B51];[$HTML.$J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54}," calcext:value-type="string">
            <text:p>{"id":"1-11","name":"直江兼続","imageUrl":"https://one-draw.jp/ijinden/cardlist/001/card/01_011.png","expansion":15,"type":1,"color":1,"term":0,"orderTable":50,"orderDeck":54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P52];[$HTML.$D$1];[.$G52];[$HTML.$E$1];[.$I52];[$HTML.$F$1];[.$K52];[$HTML.$G$1];[.$O52];[$HTML.$H$1];[.$A52];[$HTML.$I$1];[.$B52];[$HTML.$J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55}," calcext:value-type="string">
            <text:p>{"id":"1-12","name":"藤原頼通","imageUrl":"https://one-draw.jp/ijinden/cardlist/001/card/01_012.png","expansion":15,"type":1,"color":1,"term":2,"orderTable":51,"orderDeck":55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P53];[$HTML.$D$1];[.$G53];[$HTML.$E$1];[.$I53];[$HTML.$F$1];[.$K53];[$HTML.$G$1];[.$O53];[$HTML.$H$1];[.$A53];[$HTML.$I$1];[.$B53];[$HTML.$J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56}," calcext:value-type="string">
            <text:p>{"id":"1-13","name":"北条政子","imageUrl":"https://one-draw.jp/ijinden/cardlist/001/card/01_013.png","expansion":15,"type":1,"color":1,"term":0,"orderTable":52,"orderDeck":56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P54];[$HTML.$D$1];[.$G54];[$HTML.$E$1];[.$I54];[$HTML.$F$1];[.$K54];[$HTML.$G$1];[.$O54];[$HTML.$H$1];[.$A54];[$HTML.$I$1];[.$B54];[$HTML.$J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89}," calcext:value-type="string">
            <text:p>{"id":"1-14","name":"ジョージ・アームストロング・カスター","imageUrl":"https://one-draw.jp/ijinden/cardlist/001/card/01_014.png","expansion":15,"type":1,"color":1,"term":0,"orderTable":53,"orderDeck":89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P55];[$HTML.$D$1];[.$G55];[$HTML.$E$1];[.$I55];[$HTML.$F$1];[.$K55];[$HTML.$G$1];[.$O55];[$HTML.$H$1];[.$A55];[$HTML.$I$1];[.$B55];[$HTML.$J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90}," calcext:value-type="string">
            <text:p>{"id":"1-15","name":"中臣鎌足","imageUrl":"https://one-draw.jp/ijinden/cardlist/001/card/01_015.png","expansion":15,"type":1,"color":1,"term":0,"orderTable":54,"orderDeck":90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P56];[$HTML.$D$1];[.$G56];[$HTML.$E$1];[.$I56];[$HTML.$F$1];[.$K56];[$HTML.$G$1];[.$O56];[$HTML.$H$1];[.$A56];[$HTML.$I$1];[.$B56];[$HTML.$J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91}," calcext:value-type="string">
            <text:p>{"id":"1-16","name":"マルクス・アントニウス","imageUrl":"https://one-draw.jp/ijinden/cardlist/001/card/01_016.png","expansion":15,"type":1,"color":1,"term":0,"orderTable":55,"orderDeck":91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P57];[$HTML.$D$1];[.$G57];[$HTML.$E$1];[.$I57];[$HTML.$F$1];[.$K57];[$HTML.$G$1];[.$O57];[$HTML.$H$1];[.$A57];[$HTML.$I$1];[.$B57];[$HTML.$J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21}," calcext:value-type="string">
            <text:p>{"id":"1-17","name":"藤原道長","imageUrl":"https://one-draw.jp/ijinden/cardlist/001/card/01_017.png","expansion":15,"type":1,"color":1,"term":0,"orderTable":56,"orderDeck":121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P58];[$HTML.$D$1];[.$G58];[$HTML.$E$1];[.$I58];[$HTML.$F$1];[.$K58];[$HTML.$G$1];[.$O58];[$HTML.$H$1];[.$A58];[$HTML.$I$1];[.$B58];[$HTML.$J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22}," calcext:value-type="string">
            <text:p>{"id":"1-18","name":"源頼朝","imageUrl":"https://one-draw.jp/ijinden/cardlist/001/card/01_018.png","expansion":15,"type":1,"color":1,"term":0,"orderTable":57,"orderDeck":122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P59];[$HTML.$D$1];[.$G59];[$HTML.$E$1];[.$I59];[$HTML.$F$1];[.$K59];[$HTML.$G$1];[.$O59];[$HTML.$H$1];[.$A59];[$HTML.$I$1];[.$B59];[$HTML.$J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166}," calcext:value-type="string">
            <text:p>{"id":"1-19","name":"ガイウス・ユリウス・カエサル","imageUrl":"https://one-draw.jp/ijinden/cardlist/001/card/01_019.png","expansion":15,"type":1,"color":1,"term":0,"orderTable":58,"orderDeck":166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P60];[$HTML.$D$1];[.$G60];[$HTML.$E$1];[.$I60];[$HTML.$F$1];[.$K60];[$HTML.$G$1];[.$O60];[$HTML.$H$1];[.$A60];[$HTML.$I$1];[.$B60];[$HTML.$J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P61];[$HTML.$D$1];[.$G61];[$HTML.$E$1];[.$I61];[$HTML.$F$1];[.$K61];[$HTML.$G$1];[.$O61];[$HTML.$H$1];[.$A61];[$HTML.$I$1];[.$B61];[$HTML.$J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0}," calcext:value-type="string">
            <text:p>{"id":"1-21","name":"鑑真","imageUrl":"https://one-draw.jp/ijinden/cardlist/001/card/01_021.png","expansion":15,"type":1,"color":2,"term":1,"orderTable":60,"orderDeck":30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P62];[$HTML.$D$1];[.$G62];[$HTML.$E$1];[.$I62];[$HTML.$F$1];[.$K62];[$HTML.$G$1];[.$O62];[$HTML.$H$1];[.$A62];[$HTML.$I$1];[.$B62];[$HTML.$J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1}," calcext:value-type="string">
            <text:p>{"id":"1-22","name":"ジャンヌ・ダルク","imageUrl":"https://one-draw.jp/ijinden/cardlist/001/card/01_022.png","expansion":15,"type":1,"color":2,"term":0,"orderTable":61,"orderDeck":3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P63];[$HTML.$D$1];[.$G63];[$HTML.$E$1];[.$I63];[$HTML.$F$1];[.$K63];[$HTML.$G$1];[.$O63];[$HTML.$H$1];[.$A63];[$HTML.$I$1];[.$B63];[$HTML.$J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2}," calcext:value-type="string">
            <text:p>{"id":"1-23","name":"ドナテッロ","imageUrl":"https://one-draw.jp/ijinden/cardlist/001/card/01_023.png","expansion":15,"type":1,"color":2,"term":0,"orderTable":62,"orderDeck":32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P64];[$HTML.$D$1];[.$G64];[$HTML.$E$1];[.$I64];[$HTML.$F$1];[.$K64];[$HTML.$G$1];[.$O64];[$HTML.$H$1];[.$A64];[$HTML.$I$1];[.$B64];[$HTML.$J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66}," calcext:value-type="string">
            <text:p>{"id":"1-24","name":"孔子","imageUrl":"https://one-draw.jp/ijinden/cardlist/001/card/01_024.png","expansion":15,"type":1,"color":2,"term":0,"orderTable":63,"orderDeck":66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P65];[$HTML.$D$1];[.$G65];[$HTML.$E$1];[.$I65];[$HTML.$F$1];[.$K65];[$HTML.$G$1];[.$O65];[$HTML.$H$1];[.$A65];[$HTML.$I$1];[.$B65];[$HTML.$J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28}," calcext:value-type="string">
            <text:p>{"id":"1-25","name":"始皇帝","imageUrl":"https://one-draw.jp/ijinden/cardlist/001/card/01_025.png","expansion":15,"type":1,"color":2,"term":0,"orderTable":64,"orderDeck":128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P66];[$HTML.$D$1];[.$G66];[$HTML.$E$1];[.$I66];[$HTML.$F$1];[.$K66];[$HTML.$G$1];[.$O66];[$HTML.$H$1];[.$A66];[$HTML.$I$1];[.$B66];[$HTML.$J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67}," calcext:value-type="string">
            <text:p>{"id":"1-26","name":"メアリー1世","imageUrl":"https://one-draw.jp/ijinden/cardlist/001/card/01_026.png","expansion":15,"type":1,"color":2,"term":0,"orderTable":65,"orderDeck":67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P67];[$HTML.$D$1];[.$G67];[$HTML.$E$1];[.$I67];[$HTML.$F$1];[.$K67];[$HTML.$G$1];[.$O67];[$HTML.$H$1];[.$A67];[$HTML.$I$1];[.$B67];[$HTML.$J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94}," calcext:value-type="string">
            <text:p>{"id":"1-27","name":"玄宗","imageUrl":"https://one-draw.jp/ijinden/cardlist/001/card/01_027.png","expansion":15,"type":1,"color":2,"term":0,"orderTable":66,"orderDeck":9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P68];[$HTML.$D$1];[.$G68];[$HTML.$E$1];[.$I68];[$HTML.$F$1];[.$K68];[$HTML.$G$1];[.$O68];[$HTML.$H$1];[.$A68];[$HTML.$I$1];[.$B68];[$HTML.$J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95}," calcext:value-type="string">
            <text:p>{"id":"1-28","name":"シャルル7世","imageUrl":"https://one-draw.jp/ijinden/cardlist/001/card/01_028.png","expansion":15,"type":1,"color":2,"term":0,"orderTable":67,"orderDeck":9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P69];[$HTML.$D$1];[.$G69];[$HTML.$E$1];[.$I69];[$HTML.$F$1];[.$K69];[$HTML.$G$1];[.$O69];[$HTML.$H$1];[.$A69];[$HTML.$I$1];[.$B69];[$HTML.$J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96}," calcext:value-type="string">
            <text:p>{"id":"1-29","name":"フランシスコ・ザビエル","imageUrl":"https://one-draw.jp/ijinden/cardlist/001/card/01_029.png","expansion":15,"type":1,"color":2,"term":1,"orderTable":68,"orderDeck":9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P70];[$HTML.$D$1];[.$G70];[$HTML.$E$1];[.$I70];[$HTML.$F$1];[.$K70];[$HTML.$G$1];[.$O70];[$HTML.$H$1];[.$A70];[$HTML.$I$1];[.$B70];[$HTML.$J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29}," calcext:value-type="string">
            <text:p>{"id":"1-30","name":"チンギス・ハン","imageUrl":"https://one-draw.jp/ijinden/cardlist/001/card/01_030.png","expansion":15,"type":1,"color":2,"term":0,"orderTable":69,"orderDeck":129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P71];[$HTML.$D$1];[.$G71];[$HTML.$E$1];[.$I71];[$HTML.$F$1];[.$K71];[$HTML.$G$1];[.$O71];[$HTML.$H$1];[.$A71];[$HTML.$I$1];[.$B71];[$HTML.$J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30}," calcext:value-type="string">
            <text:p>{"id":"1-31","name":"ミケランジェロ","imageUrl":"https://one-draw.jp/ijinden/cardlist/001/card/01_031.png","expansion":15,"type":1,"color":2,"term":0,"orderTable":70,"orderDeck":130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P72];[$HTML.$D$1];[.$G72];[$HTML.$E$1];[.$I72];[$HTML.$F$1];[.$K72];[$HTML.$G$1];[.$O72];[$HTML.$H$1];[.$A72];[$HTML.$I$1];[.$B72];[$HTML.$J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54}," calcext:value-type="string">
            <text:p>{"id":"1-32","name":"マリー・アントワネット","imageUrl":"https://one-draw.jp/ijinden/cardlist/001/card/01_032.png","expansion":15,"type":1,"color":2,"term":0,"orderTable":71,"orderDeck":154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P73];[$HTML.$D$1];[.$G73];[$HTML.$E$1];[.$I73];[$HTML.$F$1];[.$K73];[$HTML.$G$1];[.$O73];[$HTML.$H$1];[.$A73];[$HTML.$I$1];[.$B73];[$HTML.$J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2}," calcext:value-type="string">
            <text:p>{"id":"1-33","name":"千利休","imageUrl":"https://one-draw.jp/ijinden/cardlist/001/card/01_033.png","expansion":15,"type":1,"color":4,"term":0,"orderTable":72,"orderDeck":12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P74];[$HTML.$D$1];[.$G74];[$HTML.$E$1];[.$I74];[$HTML.$F$1];[.$K74];[$HTML.$G$1];[.$O74];[$HTML.$H$1];[.$A74];[$HTML.$I$1];[.$B74];[$HTML.$J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39}," calcext:value-type="string">
            <text:p>{"id":"1-34","name":"狩野永徳","imageUrl":"https://one-draw.jp/ijinden/cardlist/001/card/01_034.png","expansion":15,"type":1,"color":4,"term":0,"orderTable":73,"orderDeck":39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P75];[$HTML.$D$1];[.$G75];[$HTML.$E$1];[.$I75];[$HTML.$F$1];[.$K75];[$HTML.$G$1];[.$O75];[$HTML.$H$1];[.$A75];[$HTML.$I$1];[.$B75];[$HTML.$J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72}," calcext:value-type="string">
            <text:p>{"id":"1-35","name":"安倍晴明","imageUrl":"https://one-draw.jp/ijinden/cardlist/001/card/01_035.png","expansion":15,"type":1,"color":4,"term":0,"orderTable":74,"orderDeck":72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P76];[$HTML.$D$1];[.$G76];[$HTML.$E$1];[.$I76];[$HTML.$F$1];[.$K76];[$HTML.$G$1];[.$O76];[$HTML.$H$1];[.$A76];[$HTML.$I$1];[.$B76];[$HTML.$J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73}," calcext:value-type="string">
            <text:p>{"id":"1-36","name":"吉田兼好","imageUrl":"https://one-draw.jp/ijinden/cardlist/001/card/01_036.png","expansion":15,"type":1,"color":4,"term":2,"orderTable":75,"orderDeck":7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P77];[$HTML.$D$1];[.$G77];[$HTML.$E$1];[.$I77];[$HTML.$F$1];[.$K77];[$HTML.$G$1];[.$O77];[$HTML.$H$1];[.$A77];[$HTML.$I$1];[.$B77];[$HTML.$J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04}," calcext:value-type="string">
            <text:p>{"id":"1-37","name":"蘆屋道満","imageUrl":"https://one-draw.jp/ijinden/cardlist/001/card/01_037.png","expansion":15,"type":1,"color":4,"term":0,"orderTable":76,"orderDeck":104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P78];[$HTML.$D$1];[.$G78];[$HTML.$E$1];[.$I78];[$HTML.$F$1];[.$K78];[$HTML.$G$1];[.$O78];[$HTML.$H$1];[.$A78];[$HTML.$I$1];[.$B78];[$HTML.$J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05}," calcext:value-type="string">
            <text:p>{"id":"1-38","name":"鴨長明","imageUrl":"https://one-draw.jp/ijinden/cardlist/001/card/01_038.png","expansion":15,"type":1,"color":4,"term":2,"orderTable":77,"orderDeck":105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P79];[$HTML.$D$1];[.$G79];[$HTML.$E$1];[.$I79];[$HTML.$F$1];[.$K79];[$HTML.$G$1];[.$O79];[$HTML.$H$1];[.$A79];[$HTML.$I$1];[.$B79];[$HTML.$J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06}," calcext:value-type="string">
            <text:p>{"id":"1-39","name":"ヨハン・ゼバスティアン・バッハ","imageUrl":"https://one-draw.jp/ijinden/cardlist/001/card/01_039.png","expansion":15,"type":1,"color":4,"term":0,"orderTable":78,"orderDeck":10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P80];[$HTML.$D$1];[.$G80];[$HTML.$E$1];[.$I80];[$HTML.$F$1];[.$K80];[$HTML.$G$1];[.$O80];[$HTML.$H$1];[.$A80];[$HTML.$I$1];[.$B80];[$HTML.$J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36}," calcext:value-type="string">
            <text:p>{"id":"1-40","name":"大伴家持","imageUrl":"https://one-draw.jp/ijinden/cardlist/001/card/01_040.png","expansion":15,"type":1,"color":4,"term":2,"orderTable":79,"orderDeck":136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P81];[$HTML.$D$1];[.$G81];[$HTML.$E$1];[.$I81];[$HTML.$F$1];[.$K81];[$HTML.$G$1];[.$O81];[$HTML.$H$1];[.$A81];[$HTML.$I$1];[.$B81];[$HTML.$J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37}," calcext:value-type="string">
            <text:p>{"id":"1-41","name":"フランツ・ペーター・シューベルト","imageUrl":"https://one-draw.jp/ijinden/cardlist/001/card/01_041.png","expansion":15,"type":1,"color":4,"term":0,"orderTable":80,"orderDeck":137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P82];[$HTML.$D$1];[.$G82];[$HTML.$E$1];[.$I82];[$HTML.$F$1];[.$K82];[$HTML.$G$1];[.$O82];[$HTML.$H$1];[.$A82];[$HTML.$I$1];[.$B82];[$HTML.$J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56}," calcext:value-type="string">
            <text:p>{"id":"1-42","name":"空海","imageUrl":"https://one-draw.jp/ijinden/cardlist/001/card/01_042.png","expansion":15,"type":1,"color":4,"term":1,"orderTable":81,"orderDeck":156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P83];[$HTML.$D$1];[.$G83];[$HTML.$E$1];[.$I83];[$HTML.$F$1];[.$K83];[$HTML.$G$1];[.$O83];[$HTML.$H$1];[.$A83];[$HTML.$I$1];[.$B83];[$HTML.$J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57}," calcext:value-type="string">
            <text:p>{"id":"1-43","name":"清少納言","imageUrl":"https://one-draw.jp/ijinden/cardlist/001/card/01_043.png","expansion":15,"type":1,"color":4,"term":2,"orderTable":82,"orderDeck":157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P84];[$HTML.$D$1];[.$G84];[$HTML.$E$1];[.$I84];[$HTML.$F$1];[.$K84];[$HTML.$G$1];[.$O84];[$HTML.$H$1];[.$A84];[$HTML.$I$1];[.$B84];[$HTML.$J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58}," calcext:value-type="string">
            <text:p>{"id":"1-44","name":"ルートヴィヒ・ヴァン・ベートーヴェン","imageUrl":"https://one-draw.jp/ijinden/cardlist/001/card/01_044.png","expansion":15,"type":1,"color":4,"term":0,"orderTable":83,"orderDeck":158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P85];[$HTML.$D$1];[.$G85];[$HTML.$E$1];[.$I85];[$HTML.$F$1];[.$K85];[$HTML.$G$1];[.$O85];[$HTML.$H$1];[.$A85];[$HTML.$I$1];[.$B85];[$HTML.$J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171}," calcext:value-type="string">
            <text:p>{"id":"1-45","name":"行基","imageUrl":"https://one-draw.jp/ijinden/cardlist/001/card/01_045.png","expansion":15,"type":1,"color":4,"term":0,"orderTable":84,"orderDeck":171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P86];[$HTML.$D$1];[.$G86];[$HTML.$E$1];[.$I86];[$HTML.$F$1];[.$K86];[$HTML.$G$1];[.$O86];[$HTML.$H$1];[.$A86];[$HTML.$I$1];[.$B86];[$HTML.$J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12}," calcext:value-type="string">
            <text:p>{"id":"1-46","name":"武者の蔵","imageUrl":"https://one-draw.jp/ijinden/cardlist/001/card/01_046.png","expansion":15,"type":2,"color":1,"term":0,"orderTable":85,"orderDeck":212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P87];[$HTML.$D$1];[.$G87];[$HTML.$E$1];[.$I87];[$HTML.$F$1];[.$K87];[$HTML.$G$1];[.$O87];[$HTML.$H$1];[.$A87];[$HTML.$I$1];[.$B87];[$HTML.$J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13}," calcext:value-type="string">
            <text:p>{"id":"1-47","name":"純白の塔","imageUrl":"https://one-draw.jp/ijinden/cardlist/001/card/01_047.png","expansion":15,"type":2,"color":2,"term":0,"orderTable":86,"orderDeck":213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P88];[$HTML.$D$1];[.$G88];[$HTML.$E$1];[.$I88];[$HTML.$F$1];[.$K88];[$HTML.$G$1];[.$O88];[$HTML.$H$1];[.$A88];[$HTML.$I$1];[.$B88];[$HTML.$J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19}," calcext:value-type="string">
            <text:p>{"id":"1-48","name":"円形闘技場","imageUrl":"https://one-draw.jp/ijinden/cardlist/001/card/01_048.png","expansion":15,"type":2,"color":2,"term":0,"orderTable":87,"orderDeck":219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P89];[$HTML.$D$1];[.$G89];[$HTML.$E$1];[.$I89];[$HTML.$F$1];[.$K89];[$HTML.$G$1];[.$O89];[$HTML.$H$1];[.$A89];[$HTML.$I$1];[.$B89];[$HTML.$J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199}," calcext:value-type="string">
            <text:p>{"id":"1-49","name":"巨大古墳","imageUrl":"https://one-draw.jp/ijinden/cardlist/001/card/01_049.png","expansion":15,"type":2,"color":4,"term":0,"orderTable":88,"orderDeck":199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P90];[$HTML.$D$1];[.$G90];[$HTML.$E$1];[.$I90];[$HTML.$F$1];[.$K90];[$HTML.$G$1];[.$O90];[$HTML.$H$1];[.$A90];[$HTML.$I$1];[.$B90];[$HTML.$J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07}," calcext:value-type="string">
            <text:p>{"id":"1-50","name":"魔除けの社","imageUrl":"https://one-draw.jp/ijinden/cardlist/001/card/01_050.png","expansion":15,"type":2,"color":4,"term":0,"orderTable":89,"orderDeck":207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P91];[$HTML.$D$1];[.$G91];[$HTML.$E$1];[.$I91];[$HTML.$F$1];[.$K91];[$HTML.$G$1];[.$O91];[$HTML.$H$1];[.$A91];[$HTML.$I$1];[.$B91];[$HTML.$J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21}," calcext:value-type="string">
            <text:p>{"id":"1-51","name":"冨嶽三十六景","imageUrl":"https://one-draw.jp/ijinden/cardlist/001/card/01_051.png","expansion":15,"type":2,"color":4,"term":0,"orderTable":90,"orderDeck":221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P92];[$HTML.$D$1];[.$G92];[$HTML.$E$1];[.$I92];[$HTML.$F$1];[.$K92];[$HTML.$G$1];[.$O92];[$HTML.$H$1];[.$A92];[$HTML.$I$1];[.$B92];[$HTML.$J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243}," calcext:value-type="string">
            <text:p>{"id":"1-52","name":"バレット","imageUrl":"https://one-draw.jp/ijinden/cardlist/001/card/01_052.png","expansion":15,"type":3,"color":1,"term":0,"orderTable":91,"orderDeck":24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P93];[$HTML.$D$1];[.$G93];[$HTML.$E$1];[.$I93];[$HTML.$F$1];[.$K93];[$HTML.$G$1];[.$O93];[$HTML.$H$1];[.$A93];[$HTML.$I$1];[.$B93];[$HTML.$J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255}," calcext:value-type="string">
            <text:p>{"id":"1-53","name":"チャンピオン","imageUrl":"https://one-draw.jp/ijinden/cardlist/001/card/01_053.png","expansion":15,"type":3,"color":1,"term":0,"orderTable":92,"orderDeck":255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P94];[$HTML.$D$1];[.$G94];[$HTML.$E$1];[.$I94];[$HTML.$F$1];[.$K94];[$HTML.$G$1];[.$O94];[$HTML.$H$1];[.$A94];[$HTML.$I$1];[.$B94];[$HTML.$J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266}," calcext:value-type="string">
            <text:p>{"id":"1-54","name":"ファイナルアタック","imageUrl":"https://one-draw.jp/ijinden/cardlist/001/card/01_054.png","expansion":15,"type":3,"color":1,"term":0,"orderTable":93,"orderDeck":266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P95];[$HTML.$D$1];[.$G95];[$HTML.$E$1];[.$I95];[$HTML.$F$1];[.$K95];[$HTML.$G$1];[.$O95];[$HTML.$H$1];[.$A95];[$HTML.$I$1];[.$B95];[$HTML.$J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34}," calcext:value-type="string">
            <text:p>{"id":"1-55","name":"ストーム","imageUrl":"https://one-draw.jp/ijinden/cardlist/001/card/01_055.png","expansion":15,"type":3,"color":2,"term":0,"orderTable":94,"orderDeck":23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P96];[$HTML.$D$1];[.$G96];[$HTML.$E$1];[.$I96];[$HTML.$F$1];[.$K96];[$HTML.$G$1];[.$O96];[$HTML.$H$1];[.$A96];[$HTML.$I$1];[.$B96];[$HTML.$J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256}," calcext:value-type="string">
            <text:p>{"id":"1-56","name":"リバイバル","imageUrl":"https://one-draw.jp/ijinden/cardlist/001/card/01_056.png","expansion":15,"type":3,"color":2,"term":0,"orderTable":95,"orderDeck":256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P97];[$HTML.$D$1];[.$G97];[$HTML.$E$1];[.$I97];[$HTML.$F$1];[.$K97];[$HTML.$G$1];[.$O97];[$HTML.$H$1];[.$A97];[$HTML.$I$1];[.$B97];[$HTML.$J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258}," calcext:value-type="string">
            <text:p>{"id":"1-57","name":"エイジング","imageUrl":"https://one-draw.jp/ijinden/cardlist/001/card/01_057.png","expansion":15,"type":3,"color":4,"term":0,"orderTable":96,"orderDeck":258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P98];[$HTML.$D$1];[.$G98];[$HTML.$E$1];[.$I98];[$HTML.$F$1];[.$K98];[$HTML.$G$1];[.$O98];[$HTML.$H$1];[.$A98];[$HTML.$I$1];[.$B98];[$HTML.$J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272}," calcext:value-type="string">
            <text:p>{"id":"1-58","name":"カンテラ","imageUrl":"https://one-draw.jp/ijinden/cardlist/001/card/01_058.png","expansion":15,"type":4,"color":1,"term":0,"orderTable":97,"orderDeck":272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P99];[$HTML.$D$1];[.$G99];[$HTML.$E$1];[.$I99];[$HTML.$F$1];[.$K99];[$HTML.$G$1];[.$O99];[$HTML.$H$1];[.$A99];[$HTML.$I$1];[.$B99];[$HTML.$J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273}," calcext:value-type="string">
            <text:p>{"id":"1-59","name":"ファイアソード","imageUrl":"https://one-draw.jp/ijinden/cardlist/001/card/01_059.png","expansion":15,"type":4,"color":1,"term":0,"orderTable":98,"orderDeck":273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P100];[$HTML.$D$1];[.$G100];[$HTML.$E$1];[.$I100];[$HTML.$F$1];[.$K100];[$HTML.$G$1];[.$O100];[$HTML.$H$1];[.$A100];[$HTML.$I$1];[.$B100];[$HTML.$J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274}," calcext:value-type="string">
            <text:p>{"id":"1-60","name":"髭切","imageUrl":"https://one-draw.jp/ijinden/cardlist/001/card/01_060.png","expansion":15,"type":4,"color":1,"term":0,"orderTable":99,"orderDeck":274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P101];[$HTML.$D$1];[.$G101];[$HTML.$E$1];[.$I101];[$HTML.$F$1];[.$K101];[$HTML.$G$1];[.$O101];[$HTML.$H$1];[.$A101];[$HTML.$I$1];[.$B101];[$HTML.$J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00}," calcext:value-type="string">
            <text:p>{"id":"1-61","name":"レッドオーブ","imageUrl":"https://one-draw.jp/ijinden/cardlist/001/card/01_061.png","expansion":15,"type":4,"color":1,"term":0,"orderTable":100,"orderDeck":300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P102];[$HTML.$D$1];[.$G102];[$HTML.$E$1];[.$I102];[$HTML.$F$1];[.$K102];[$HTML.$G$1];[.$O102];[$HTML.$H$1];[.$A102];[$HTML.$I$1];[.$B102];[$HTML.$J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277}," calcext:value-type="string">
            <text:p>{"id":"1-62","name":"ウォーターポット","imageUrl":"https://one-draw.jp/ijinden/cardlist/001/card/01_062.png","expansion":15,"type":4,"color":2,"term":0,"orderTable":101,"orderDeck":277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P103];[$HTML.$D$1];[.$G103];[$HTML.$E$1];[.$I103];[$HTML.$F$1];[.$K103];[$HTML.$G$1];[.$O103];[$HTML.$H$1];[.$A103];[$HTML.$I$1];[.$B103];[$HTML.$J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278}," calcext:value-type="string">
            <text:p>{"id":"1-63","name":"アイスソード","imageUrl":"https://one-draw.jp/ijinden/cardlist/001/card/01_063.png","expansion":15,"type":4,"color":2,"term":0,"orderTable":102,"orderDeck":278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P104];[$HTML.$D$1];[.$G104];[$HTML.$E$1];[.$I104];[$HTML.$F$1];[.$K104];[$HTML.$G$1];[.$O104];[$HTML.$H$1];[.$A104];[$HTML.$I$1];[.$B104];[$HTML.$J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279}," calcext:value-type="string">
            <text:p>{"id":"1-64","name":"羅針盤","imageUrl":"https://one-draw.jp/ijinden/cardlist/001/card/01_064.png","expansion":15,"type":4,"color":2,"term":0,"orderTable":103,"orderDeck":279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P105];[$HTML.$D$1];[.$G105];[$HTML.$E$1];[.$I105];[$HTML.$F$1];[.$K105];[$HTML.$G$1];[.$O105];[$HTML.$H$1];[.$A105];[$HTML.$I$1];[.$B105];[$HTML.$J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01}," calcext:value-type="string">
            <text:p>{"id":"1-65","name":"ブルーオーブ","imageUrl":"https://one-draw.jp/ijinden/cardlist/001/card/01_065.png","expansion":15,"type":4,"color":2,"term":0,"orderTable":104,"orderDeck":301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P106];[$HTML.$D$1];[.$G106];[$HTML.$E$1];[.$I106];[$HTML.$F$1];[.$K106];[$HTML.$G$1];[.$O106];[$HTML.$H$1];[.$A106];[$HTML.$I$1];[.$B106];[$HTML.$J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282}," calcext:value-type="string">
            <text:p>{"id":"1-66","name":"ポプリ","imageUrl":"https://one-draw.jp/ijinden/cardlist/001/card/01_066.png","expansion":15,"type":4,"color":4,"term":0,"orderTable":105,"orderDeck":282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P107];[$HTML.$D$1];[.$G107];[$HTML.$E$1];[.$I107];[$HTML.$F$1];[.$K107];[$HTML.$G$1];[.$O107];[$HTML.$H$1];[.$A107];[$HTML.$I$1];[.$B107];[$HTML.$J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283}," calcext:value-type="string">
            <text:p>{"id":"1-67","name":"ウッドスタッフ","imageUrl":"https://one-draw.jp/ijinden/cardlist/001/card/01_067.png","expansion":15,"type":4,"color":4,"term":0,"orderTable":106,"orderDeck":283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P108];[$HTML.$D$1];[.$G108];[$HTML.$E$1];[.$I108];[$HTML.$F$1];[.$K108];[$HTML.$G$1];[.$O108];[$HTML.$H$1];[.$A108];[$HTML.$I$1];[.$B108];[$HTML.$J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284}," calcext:value-type="string">
            <text:p>{"id":"1-68","name":"万葉集","imageUrl":"https://one-draw.jp/ijinden/cardlist/001/card/01_068.png","expansion":15,"type":4,"color":4,"term":0,"orderTable":107,"orderDeck":284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P109];[$HTML.$D$1];[.$G109];[$HTML.$E$1];[.$I109];[$HTML.$F$1];[.$K109];[$HTML.$G$1];[.$O109];[$HTML.$H$1];[.$A109];[$HTML.$I$1];[.$B109];[$HTML.$J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02}," calcext:value-type="string">
            <text:p>{"id":"1-69","name":"グリーンオーブ","imageUrl":"https://one-draw.jp/ijinden/cardlist/001/card/01_069.png","expansion":15,"type":4,"color":4,"term":0,"orderTable":108,"orderDeck":302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P110];[$HTML.$D$1];[.$G110];[$HTML.$E$1];[.$I110];[$HTML.$F$1];[.$K110];[$HTML.$G$1];[.$O110];[$HTML.$H$1];[.$A110];[$HTML.$I$1];[.$B110];[$HTML.$J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57}," calcext:value-type="string">
            <text:p>{"id":"1-70","name":"ビスマルク","imageUrl":"https://one-draw.jp/ijinden/cardlist/001/card/01_070.png","expansion":15,"type":1,"color":1,"term":0,"orderTable":109,"orderDeck":57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P111];[$HTML.$D$1];[.$G111];[$HTML.$E$1];[.$I111];[$HTML.$F$1];[.$K111];[$HTML.$G$1];[.$O111];[$HTML.$H$1];[.$A111];[$HTML.$I$1];[.$B111];[$HTML.$J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P112];[$HTML.$D$1];[.$G112];[$HTML.$E$1];[.$I112];[$HTML.$F$1];[.$K112];[$HTML.$G$1];[.$O112];[$HTML.$H$1];[.$A112];[$HTML.$I$1];[.$B112];[$HTML.$J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5}," calcext:value-type="string">
            <text:p>{"id":"1-72","name":"大江広元","imageUrl":"https://one-draw.jp/ijinden/cardlist/001/card/01_072.png","expansion":15,"type":1,"color":1,"term":0,"orderTable":111,"orderDeck":25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P113];[$HTML.$D$1];[.$G113];[$HTML.$E$1];[.$I113];[$HTML.$F$1];[.$K113];[$HTML.$G$1];[.$O113];[$HTML.$H$1];[.$A113];[$HTML.$I$1];[.$B113];[$HTML.$J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97}," calcext:value-type="string">
            <text:p>{"id":"1-73","name":"グスタフ2世アドルフ","imageUrl":"https://one-draw.jp/ijinden/cardlist/001/card/01_073.png","expansion":15,"type":1,"color":2,"term":0,"orderTable":112,"orderDeck":9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P114];[$HTML.$D$1];[.$G114];[$HTML.$E$1];[.$I114];[$HTML.$F$1];[.$K114];[$HTML.$G$1];[.$O114];[$HTML.$H$1];[.$A114];[$HTML.$I$1];[.$B114];[$HTML.$J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98}," calcext:value-type="string">
            <text:p>{"id":"1-74","name":"オリバー・クロムウェル","imageUrl":"https://one-draw.jp/ijinden/cardlist/001/card/01_074.png","expansion":15,"type":1,"color":2,"term":0,"orderTable":113,"orderDeck":9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P115];[$HTML.$D$1];[.$G115];[$HTML.$E$1];[.$I115];[$HTML.$F$1];[.$K115];[$HTML.$G$1];[.$O115];[$HTML.$H$1];[.$A115];[$HTML.$I$1];[.$B115];[$HTML.$J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99}," calcext:value-type="string">
            <text:p>{"id":"1-75","name":"衛青","imageUrl":"https://one-draw.jp/ijinden/cardlist/001/card/01_075.png","expansion":15,"type":1,"color":2,"term":0,"orderTable":114,"orderDeck":9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P116];[$HTML.$D$1];[.$G116];[$HTML.$E$1];[.$I116];[$HTML.$F$1];[.$K116];[$HTML.$G$1];[.$O116];[$HTML.$H$1];[.$A116];[$HTML.$I$1];[.$B116];[$HTML.$J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38}," calcext:value-type="string">
            <text:p>{"id":"1-76","name":"シーボルト","imageUrl":"https://one-draw.jp/ijinden/cardlist/001/card/01_076.png","expansion":15,"type":1,"color":4,"term":0,"orderTable":115,"orderDeck":138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P117];[$HTML.$D$1];[.$G117];[$HTML.$E$1];[.$I117];[$HTML.$F$1];[.$K117];[$HTML.$G$1];[.$O117];[$HTML.$H$1];[.$A117];[$HTML.$I$1];[.$B117];[$HTML.$J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0}," calcext:value-type="string">
            <text:p>{"id":"1-77","name":"乾隆帝","imageUrl":"https://one-draw.jp/ijinden/cardlist/001/card/01_077.png","expansion":15,"type":1,"color":4,"term":0,"orderTable":116,"orderDeck":40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P118];[$HTML.$D$1];[.$G118];[$HTML.$E$1];[.$I118];[$HTML.$F$1];[.$K118];[$HTML.$G$1];[.$O118];[$HTML.$H$1];[.$A118];[$HTML.$I$1];[.$B118];[$HTML.$J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74}," calcext:value-type="string">
            <text:p>{"id":"1-78","name":"小野好古","imageUrl":"https://one-draw.jp/ijinden/cardlist/001/card/01_078.png","expansion":15,"type":1,"color":4,"term":0,"orderTable":117,"orderDeck":74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P119];[$HTML.$D$1];[.$G119];[$HTML.$E$1];[.$I119];[$HTML.$F$1];[.$K119];[$HTML.$G$1];[.$O119];[$HTML.$H$1];[.$A119];[$HTML.$I$1];[.$B119];[$HTML.$J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39}," calcext:value-type="string">
            <text:p>{"id":"1-79","name":"アレッサンドロ・ヴァリニャーノ","imageUrl":"https://one-draw.jp/ijinden/cardlist/001/card/01_079.png","expansion":15,"type":1,"color":4,"term":1,"orderTable":118,"orderDeck":139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P120];[$HTML.$D$1];[.$G120];[$HTML.$E$1];[.$I120];[$HTML.$F$1];[.$K120];[$HTML.$G$1];[.$O120];[$HTML.$H$1];[.$A120];[$HTML.$I$1];[.$B120];[$HTML.$J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59}," calcext:value-type="string">
            <text:p>{"id":"1-80","name":"角倉了以","imageUrl":"https://one-draw.jp/ijinden/cardlist/001/card/01_080.png","expansion":15,"type":1,"color":4,"term":0,"orderTable":119,"orderDeck":159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P121];[$HTML.$D$1];[.$G121];[$HTML.$E$1];[.$I121];[$HTML.$F$1];[.$K121];[$HTML.$G$1];[.$O121];[$HTML.$H$1];[.$A121];[$HTML.$I$1];[.$B121];[$HTML.$J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62}," calcext:value-type="string">
            <text:p>{"id":"Y-1","name":"諸葛亮","imageUrl":"https://one-draw.jp/ijinden/cardlist/Y01/card/02_Y_001.png","expansion":20,"type":1,"color":8,"term":0,"orderTable":120,"orderDeck":162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P122];[$HTML.$D$1];[.$G122];[$HTML.$E$1];[.$I122];[$HTML.$F$1];[.$K122];[$HTML.$G$1];[.$O122];[$HTML.$H$1];[.$A122];[$HTML.$I$1];[.$B122];[$HTML.$J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44}," calcext:value-type="string">
            <text:p>{"id":"Y-2","name":"今川義元","imageUrl":"https://one-draw.jp/ijinden/cardlist/Y01/card/02_Y_002.png","expansion":20,"type":1,"color":8,"term":0,"orderTable":121,"orderDeck":44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P123];[$HTML.$D$1];[.$G123];[$HTML.$E$1];[.$I123];[$HTML.$F$1];[.$K123];[$HTML.$G$1];[.$O123];[$HTML.$H$1];[.$A123];[$HTML.$I$1];[.$B123];[$HTML.$J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09}," calcext:value-type="string">
            <text:p>{"id":"Y-3","name":"周瑜","imageUrl":"https://one-draw.jp/ijinden/cardlist/Y01/card/02_Y_003.png","expansion":20,"type":1,"color":8,"term":0,"orderTable":122,"orderDeck":109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P124];[$HTML.$D$1];[.$G124];[$HTML.$E$1];[.$I124];[$HTML.$F$1];[.$K124];[$HTML.$G$1];[.$O124];[$HTML.$H$1];[.$A124];[$HTML.$I$1];[.$B124];[$HTML.$J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42}," calcext:value-type="string">
            <text:p>{"id":"Y-4","name":"孫権","imageUrl":"https://one-draw.jp/ijinden/cardlist/Y01/card/02_Y_004.png","expansion":20,"type":1,"color":8,"term":0,"orderTable":123,"orderDeck":142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P125];[$HTML.$D$1];[.$G125];[$HTML.$E$1];[.$I125];[$HTML.$F$1];[.$K125];[$HTML.$G$1];[.$O125];[$HTML.$H$1];[.$A125];[$HTML.$I$1];[.$B125];[$HTML.$J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4,&quot;orderTable&quot;:124,&quot;orderDeck&quot;:174}," calcext:value-type="string">
            <text:p>{"id":"Y-5","name":"シャクシャイン","imageUrl":"https://one-draw.jp/ijinden/cardlist/Y01/card/02_Y_005.png","expansion":20,"type":1,"color":8,"term":4,"orderTable":124,"orderDeck":174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P126];[$HTML.$D$1];[.$G126];[$HTML.$E$1];[.$I126];[$HTML.$F$1];[.$K126];[$HTML.$G$1];[.$O126];[$HTML.$H$1];[.$A126];[$HTML.$I$1];[.$B126];[$HTML.$J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63}," calcext:value-type="string">
            <text:p>{"id":"Y-6","name":"フビライ・ハン","imageUrl":"https://one-draw.jp/ijinden/cardlist/Y01/card/02_Y_006.png","expansion":20,"type":1,"color":8,"term":0,"orderTable":125,"orderDeck":163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P127];[$HTML.$D$1];[.$G127];[$HTML.$E$1];[.$I127];[$HTML.$F$1];[.$K127];[$HTML.$G$1];[.$O127];[$HTML.$H$1];[.$A127];[$HTML.$I$1];[.$B127];[$HTML.$J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45}," calcext:value-type="string">
            <text:p>{"id":"Y-7","name":"足利義教","imageUrl":"https://one-draw.jp/ijinden/cardlist/Y01/card/02_Y_007.png","expansion":20,"type":1,"color":8,"term":0,"orderTable":126,"orderDeck":45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P128];[$HTML.$D$1];[.$G128];[$HTML.$E$1];[.$I128];[$HTML.$F$1];[.$K128];[$HTML.$G$1];[.$O128];[$HTML.$H$1];[.$A128];[$HTML.$I$1];[.$B128];[$HTML.$J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4}," calcext:value-type="string">
            <text:p>{"id":"Y-8","name":"ヴィジェ＝ルブラン","imageUrl":"https://one-draw.jp/ijinden/cardlist/Y01/card/02_Y_008.png","expansion":20,"type":1,"color":8,"term":0,"orderTable":127,"orderDeck":14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P129];[$HTML.$D$1];[.$G129];[$HTML.$E$1];[.$I129];[$HTML.$F$1];[.$K129];[$HTML.$G$1];[.$O129];[$HTML.$H$1];[.$A129];[$HTML.$I$1];[.$B129];[$HTML.$J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09}," calcext:value-type="string">
            <text:p>{"id":"Y-9","name":"英傑集う大河","imageUrl":"https://one-draw.jp/ijinden/cardlist/Y01/card/02_Y_009.png","expansion":20,"type":2,"color":8,"term":0,"orderTable":128,"orderDeck":209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P130];[$HTML.$D$1];[.$G130];[$HTML.$E$1];[.$I130];[$HTML.$F$1];[.$K130];[$HTML.$G$1];[.$O130];[$HTML.$H$1];[.$A130];[$HTML.$I$1];[.$B130];[$HTML.$J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01}," calcext:value-type="string">
            <text:p>{"id":"Y-10","name":"地上の紫微垣","imageUrl":"https://one-draw.jp/ijinden/cardlist/Y01/card/02_Y_010.png","expansion":20,"type":2,"color":8,"term":0,"orderTable":129,"orderDeck":201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P131];[$HTML.$D$1];[.$G131];[$HTML.$E$1];[.$I131];[$HTML.$F$1];[.$K131];[$HTML.$G$1];[.$O131];[$HTML.$H$1];[.$A131];[$HTML.$I$1];[.$B131];[$HTML.$J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240}," calcext:value-type="string">
            <text:p>{"id":"Y-11","name":"ネハン","imageUrl":"https://one-draw.jp/ijinden/cardlist/Y01/card/02_Y_011.png","expansion":20,"type":3,"color":8,"term":0,"orderTable":130,"orderDeck":24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P132];[$HTML.$D$1];[.$G132];[$HTML.$E$1];[.$I132];[$HTML.$F$1];[.$K132];[$HTML.$G$1];[.$O132];[$HTML.$H$1];[.$A132];[$HTML.$I$1];[.$B132];[$HTML.$J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30}," calcext:value-type="string">
            <text:p>{"id":"Y-12","name":"レクイエム","imageUrl":"https://one-draw.jp/ijinden/cardlist/Y01/card/02_Y_012.png","expansion":20,"type":3,"color":8,"term":0,"orderTable":131,"orderDeck":230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P133];[$HTML.$D$1];[.$G133];[$HTML.$E$1];[.$I133];[$HTML.$F$1];[.$K133];[$HTML.$G$1];[.$O133];[$HTML.$H$1];[.$A133];[$HTML.$I$1];[.$B133];[$HTML.$J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286}," calcext:value-type="string">
            <text:p>{"id":"Y-13","name":"イエローストーン","imageUrl":"https://one-draw.jp/ijinden/cardlist/Y01/card/02_Y_013.png","expansion":20,"type":4,"color":8,"term":0,"orderTable":132,"orderDeck":286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P134];[$HTML.$D$1];[.$G134];[$HTML.$E$1];[.$I134];[$HTML.$F$1];[.$K134];[$HTML.$G$1];[.$O134];[$HTML.$H$1];[.$A134];[$HTML.$I$1];[.$B134];[$HTML.$J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4,&quot;orderTable&quot;:133,&quot;orderDeck&quot;:58}," calcext:value-type="string">
            <text:p>{"id":"2-1","name":"天草四郎","imageUrl":"https://one-draw.jp/ijinden/cardlist/002/card/02_001.png","expansion":25,"type":1,"color":1,"term":4,"orderTable":133,"orderDeck":58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P135];[$HTML.$D$1];[.$G135];[$HTML.$E$1];[.$I135];[$HTML.$F$1];[.$K135];[$HTML.$G$1];[.$O135];[$HTML.$H$1];[.$A135];[$HTML.$I$1];[.$B135];[$HTML.$J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8,&quot;orderTable&quot;:134,&quot;orderDeck&quot;:131}," calcext:value-type="string">
            <text:p>{"id":"2-2","name":"ピョートル大帝","imageUrl":"https://one-draw.jp/ijinden/cardlist/002/card/02_002.png","expansion":25,"type":1,"color":2,"term":8,"orderTable":134,"orderDeck":131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P136];[$HTML.$D$1];[.$G136];[$HTML.$E$1];[.$I136];[$HTML.$F$1];[.$K136];[$HTML.$G$1];[.$O136];[$HTML.$H$1];[.$A136];[$HTML.$I$1];[.$B136];[$HTML.$J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190}," calcext:value-type="string">
            <text:p>{"id":"2-3","name":"エイブラハム・リンカン","imageUrl":"https://one-draw.jp/ijinden/cardlist/002/card/02_003.png","expansion":25,"type":1,"color":4,"term":0,"orderTable":135,"orderDeck":19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P137];[$HTML.$D$1];[.$G137];[$HTML.$E$1];[.$I137];[$HTML.$F$1];[.$K137];[$HTML.$G$1];[.$O137];[$HTML.$H$1];[.$A137];[$HTML.$I$1];[.$B137];[$HTML.$J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184}," calcext:value-type="string">
            <text:p>{"id":"2-4","name":"アイザック・ニュートン","imageUrl":"https://one-draw.jp/ijinden/cardlist/002/card/02_004.png","expansion":25,"type":1,"color":8,"term":0,"orderTable":136,"orderDeck":18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P138];[$HTML.$D$1];[.$G138];[$HTML.$E$1];[.$I138];[$HTML.$F$1];[.$K138];[$HTML.$G$1];[.$O138];[$HTML.$H$1];[.$A138];[$HTML.$I$1];[.$B138];[$HTML.$J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10}," calcext:value-type="string">
            <text:p>{"id":"2-5","name":"親鸞","imageUrl":"https://one-draw.jp/ijinden/cardlist/002/card/02_005.png","expansion":25,"type":1,"color":8,"term":0,"orderTable":137,"orderDeck":110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P139];[$HTML.$D$1];[.$G139];[$HTML.$E$1];[.$I139];[$HTML.$F$1];[.$K139];[$HTML.$G$1];[.$O139];[$HTML.$H$1];[.$A139];[$HTML.$I$1];[.$B139];[$HTML.$J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8,&quot;orderTable&quot;:138,&quot;orderDeck&quot;:175}," calcext:value-type="string">
            <text:p>{"id":"2-6","name":"ナポレオン・ボナパルト","imageUrl":"https://one-draw.jp/ijinden/cardlist/002/card/02_006.png","expansion":25,"type":1,"color":8,"term":8,"orderTable":138,"orderDeck":175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P140];[$HTML.$D$1];[.$G140];[$HTML.$E$1];[.$I140];[$HTML.$F$1];[.$K140];[$HTML.$G$1];[.$O140];[$HTML.$H$1];[.$A140];[$HTML.$I$1];[.$B140];[$HTML.$J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6}," calcext:value-type="string">
            <text:p>{"id":"2-7","name":"日野富子","imageUrl":"https://one-draw.jp/ijinden/cardlist/002/card/02_007.png","expansion":25,"type":1,"color":1,"term":0,"orderTable":139,"orderDeck":26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P141];[$HTML.$D$1];[.$G141];[$HTML.$E$1];[.$I141];[$HTML.$F$1];[.$K141];[$HTML.$G$1];[.$O141];[$HTML.$H$1];[.$A141];[$HTML.$I$1];[.$B141];[$HTML.$J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194}," calcext:value-type="string">
            <text:p>{"id":"2-8","name":"豊臣秀吉","imageUrl":"https://one-draw.jp/ijinden/cardlist/002/card/02_008.png","expansion":25,"type":1,"color":1,"term":0,"orderTable":140,"orderDeck":19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P142];[$HTML.$D$1];[.$G142];[$HTML.$E$1];[.$I142];[$HTML.$F$1];[.$K142];[$HTML.$G$1];[.$O142];[$HTML.$H$1];[.$A142];[$HTML.$I$1];[.$B142];[$HTML.$J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4,&quot;orderTable&quot;:141,&quot;orderDeck&quot;:123}," calcext:value-type="string">
            <text:p>{"id":"2-9","name":"石田三成","imageUrl":"https://one-draw.jp/ijinden/cardlist/002/card/02_009.png","expansion":25,"type":1,"color":1,"term":4,"orderTable":141,"orderDeck":123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P143];[$HTML.$D$1];[.$G143];[$HTML.$E$1];[.$I143];[$HTML.$F$1];[.$K143];[$HTML.$G$1];[.$O143];[$HTML.$H$1];[.$A143];[$HTML.$I$1];[.$B143];[$HTML.$J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P144];[$HTML.$D$1];[.$G144];[$HTML.$E$1];[.$I144];[$HTML.$F$1];[.$K144];[$HTML.$G$1];[.$O144];[$HTML.$H$1];[.$A144];[$HTML.$I$1];[.$B144];[$HTML.$J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59}," calcext:value-type="string">
            <text:p>{"id":"2-11","name":"道元","imageUrl":"https://one-draw.jp/ijinden/cardlist/002/card/02_011.png","expansion":25,"type":1,"color":1,"term":0,"orderTable":143,"orderDeck":59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P145];[$HTML.$D$1];[.$G145];[$HTML.$E$1];[.$I145];[$HTML.$F$1];[.$K145];[$HTML.$G$1];[.$O145];[$HTML.$H$1];[.$A145];[$HTML.$I$1];[.$B145];[$HTML.$J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189}," calcext:value-type="string">
            <text:p>{"id":"2-12","name":"足利義昭","imageUrl":"https://one-draw.jp/ijinden/cardlist/002/card/02_012.png","expansion":25,"type":1,"color":1,"term":0,"orderTable":144,"orderDeck":18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P146];[$HTML.$D$1];[.$G146];[$HTML.$E$1];[.$I146];[$HTML.$F$1];[.$K146];[$HTML.$G$1];[.$O146];[$HTML.$H$1];[.$A146];[$HTML.$I$1];[.$B146];[$HTML.$J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50}," calcext:value-type="string">
            <text:p>{"id":"2-13","name":"毛利輝元","imageUrl":"https://one-draw.jp/ijinden/cardlist/002/card/02_013.png","expansion":25,"type":1,"color":1,"term":0,"orderTable":145,"orderDeck":150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P147];[$HTML.$D$1];[.$G147];[$HTML.$E$1];[.$I147];[$HTML.$F$1];[.$K147];[$HTML.$G$1];[.$O147];[$HTML.$H$1];[.$A147];[$HTML.$I$1];[.$B147];[$HTML.$J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24}," calcext:value-type="string">
            <text:p>{"id":"2-14","name":"北条時政","imageUrl":"https://one-draw.jp/ijinden/cardlist/002/card/02_014.png","expansion":25,"type":1,"color":1,"term":0,"orderTable":146,"orderDeck":124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P148];[$HTML.$D$1];[.$G148];[$HTML.$E$1];[.$I148];[$HTML.$F$1];[.$K148];[$HTML.$G$1];[.$O148];[$HTML.$H$1];[.$A148];[$HTML.$I$1];[.$B148];[$HTML.$J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167}," calcext:value-type="string">
            <text:p>{"id":"2-15","name":"北条時宗","imageUrl":"https://one-draw.jp/ijinden/cardlist/002/card/02_015.png","expansion":25,"type":1,"color":1,"term":0,"orderTable":147,"orderDeck":167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P149];[$HTML.$D$1];[.$G149];[$HTML.$E$1];[.$I149];[$HTML.$F$1];[.$K149];[$HTML.$G$1];[.$O149];[$HTML.$H$1];[.$A149];[$HTML.$I$1];[.$B149];[$HTML.$J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3}," calcext:value-type="string">
            <text:p>{"id":"2-16","name":"シャルル・ド・モンテスキュー","imageUrl":"https://one-draw.jp/ijinden/cardlist/002/card/02_016.png","expansion":25,"type":1,"color":2,"term":0,"orderTable":148,"orderDeck":33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P150];[$HTML.$D$1];[.$G150];[$HTML.$E$1];[.$I150];[$HTML.$F$1];[.$K150];[$HTML.$G$1];[.$O150];[$HTML.$H$1];[.$A150];[$HTML.$I$1];[.$B150];[$HTML.$J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68}," calcext:value-type="string">
            <text:p>{"id":"2-17","name":"ジャン＝ジャック・ルソー","imageUrl":"https://one-draw.jp/ijinden/cardlist/002/card/02_017.png","expansion":25,"type":1,"color":2,"term":0,"orderTable":149,"orderDeck":68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P151];[$HTML.$D$1];[.$G151];[$HTML.$E$1];[.$I151];[$HTML.$F$1];[.$K151];[$HTML.$G$1];[.$O151];[$HTML.$H$1];[.$A151];[$HTML.$I$1];[.$B151];[$HTML.$J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4}," calcext:value-type="string">
            <text:p>{"id":"2-18","name":"エカチェリーナ2世","imageUrl":"https://one-draw.jp/ijinden/cardlist/002/card/02_018.png","expansion":25,"type":1,"color":2,"term":0,"orderTable":150,"orderDeck":34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P152];[$HTML.$D$1];[.$G152];[$HTML.$E$1];[.$I152];[$HTML.$F$1];[.$K152];[$HTML.$G$1];[.$O152];[$HTML.$H$1];[.$A152];[$HTML.$I$1];[.$B152];[$HTML.$J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P153];[$HTML.$D$1];[.$G153];[$HTML.$E$1];[.$I153];[$HTML.$F$1];[.$K153];[$HTML.$G$1];[.$O153];[$HTML.$H$1];[.$A153];[$HTML.$I$1];[.$B153];[$HTML.$J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8,&quot;orderTable&quot;:152,&quot;orderDeck&quot;:35}," calcext:value-type="string">
            <text:p>{"id":"2-20","name":"洪秀全","imageUrl":"https://one-draw.jp/ijinden/cardlist/002/card/02_020.png","expansion":25,"type":1,"color":2,"term":8,"orderTable":152,"orderDeck":35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P154];[$HTML.$D$1];[.$G154];[$HTML.$E$1];[.$I154];[$HTML.$F$1];[.$K154];[$HTML.$G$1];[.$O154];[$HTML.$H$1];[.$A154];[$HTML.$I$1];[.$B154];[$HTML.$J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69}," calcext:value-type="string">
            <text:p>{"id":"2-21","name":"ジェームズ＝ワット","imageUrl":"https://one-draw.jp/ijinden/cardlist/002/card/02_021.png","expansion":25,"type":1,"color":2,"term":0,"orderTable":153,"orderDeck":69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P155];[$HTML.$D$1];[.$G155];[$HTML.$E$1];[.$I155];[$HTML.$F$1];[.$K155];[$HTML.$G$1];[.$O155];[$HTML.$H$1];[.$A155];[$HTML.$I$1];[.$B155];[$HTML.$J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00}," calcext:value-type="string">
            <text:p>{"id":"2-22","name":"日蓮","imageUrl":"https://one-draw.jp/ijinden/cardlist/002/card/02_022.png","expansion":25,"type":1,"color":2,"term":1,"orderTable":154,"orderDeck":10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P156];[$HTML.$D$1];[.$G156];[$HTML.$E$1];[.$I156];[$HTML.$F$1];[.$K156];[$HTML.$G$1];[.$O156];[$HTML.$H$1];[.$A156];[$HTML.$I$1];[.$B156];[$HTML.$J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168}," calcext:value-type="string">
            <text:p>{"id":"2-23","name":"李舜臣","imageUrl":"https://one-draw.jp/ijinden/cardlist/002/card/02_023.png","expansion":25,"type":1,"color":2,"term":0,"orderTable":155,"orderDeck":168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P157];[$HTML.$D$1];[.$G157];[$HTML.$E$1];[.$I157];[$HTML.$F$1];[.$K157];[$HTML.$G$1];[.$O157];[$HTML.$H$1];[.$A157];[$HTML.$I$1];[.$B157];[$HTML.$J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32}," calcext:value-type="string">
            <text:p>{"id":"2-24","name":"山田長政","imageUrl":"https://one-draw.jp/ijinden/cardlist/002/card/02_024.png","expansion":25,"type":1,"color":2,"term":1,"orderTable":156,"orderDeck":132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P158];[$HTML.$D$1];[.$G158];[$HTML.$E$1];[.$I158];[$HTML.$F$1];[.$K158];[$HTML.$G$1];[.$O158];[$HTML.$H$1];[.$A158];[$HTML.$I$1];[.$B158];[$HTML.$J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60}," calcext:value-type="string">
            <text:p>{"id":"2-25","name":"運慶","imageUrl":"https://one-draw.jp/ijinden/cardlist/002/card/02_025.png","expansion":25,"type":1,"color":4,"term":0,"orderTable":157,"orderDeck":160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P159];[$HTML.$D$1];[.$G159];[$HTML.$E$1];[.$I159];[$HTML.$F$1];[.$K159];[$HTML.$G$1];[.$O159];[$HTML.$H$1];[.$A159];[$HTML.$I$1];[.$B159];[$HTML.$J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1}," calcext:value-type="string">
            <text:p>{"id":"2-26","name":"ハリエット・ビーチャー・ストウ","imageUrl":"https://one-draw.jp/ijinden/cardlist/002/card/02_026.png","expansion":25,"type":1,"color":4,"term":2,"orderTable":158,"orderDeck":41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P160];[$HTML.$D$1];[.$G160];[$HTML.$E$1];[.$I160];[$HTML.$F$1];[.$K160];[$HTML.$G$1];[.$O160];[$HTML.$H$1];[.$A160];[$HTML.$I$1];[.$B160];[$HTML.$J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4,&quot;orderTable&quot;:159,&quot;orderDeck&quot;:75}," calcext:value-type="string">
            <text:p>{"id":"2-27","name":"コシャマイン","imageUrl":"https://one-draw.jp/ijinden/cardlist/002/card/02_027.png","expansion":25,"type":1,"color":4,"term":4,"orderTable":159,"orderDeck":75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P161];[$HTML.$D$1];[.$G161];[$HTML.$E$1];[.$I161];[$HTML.$F$1];[.$K161];[$HTML.$G$1];[.$O161];[$HTML.$H$1];[.$A161];[$HTML.$I$1];[.$B161];[$HTML.$J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172}," calcext:value-type="string">
            <text:p>{"id":"2-28","name":"狩野山楽","imageUrl":"https://one-draw.jp/ijinden/cardlist/002/card/02_028.png","expansion":25,"type":1,"color":4,"term":0,"orderTable":160,"orderDeck":172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P162];[$HTML.$D$1];[.$G162];[$HTML.$E$1];[.$I162];[$HTML.$F$1];[.$K162];[$HTML.$G$1];[.$O162];[$HTML.$H$1];[.$A162];[$HTML.$I$1];[.$B162];[$HTML.$J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07}," calcext:value-type="string">
            <text:p>{"id":"2-29","name":"徳川家光","imageUrl":"https://one-draw.jp/ijinden/cardlist/002/card/02_029.png","expansion":25,"type":1,"color":4,"term":0,"orderTable":161,"orderDeck":107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P163];[$HTML.$D$1];[.$G163];[$HTML.$E$1];[.$I163];[$HTML.$F$1];[.$K163];[$HTML.$G$1];[.$O163];[$HTML.$H$1];[.$A163];[$HTML.$I$1];[.$B163];[$HTML.$J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40}," calcext:value-type="string">
            <text:p>{"id":"2-30","name":"徳川綱吉","imageUrl":"https://one-draw.jp/ijinden/cardlist/002/card/02_030.png","expansion":25,"type":1,"color":4,"term":0,"orderTable":162,"orderDeck":140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P164];[$HTML.$D$1];[.$G164];[$HTML.$E$1];[.$I164];[$HTML.$F$1];[.$K164];[$HTML.$G$1];[.$O164];[$HTML.$H$1];[.$A164];[$HTML.$I$1];[.$B164];[$HTML.$J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183}," calcext:value-type="string">
            <text:p>{"id":"2-31","name":"東洲斎写楽","imageUrl":"https://one-draw.jp/ijinden/cardlist/002/card/02_031.png","expansion":25,"type":1,"color":4,"term":0,"orderTable":163,"orderDeck":18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P165];[$HTML.$D$1];[.$G165];[$HTML.$E$1];[.$I165];[$HTML.$F$1];[.$K165];[$HTML.$G$1];[.$O165];[$HTML.$H$1];[.$A165];[$HTML.$I$1];[.$B165];[$HTML.$J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8,&quot;orderTable&quot;:164,&quot;orderDeck&quot;:111}," calcext:value-type="string">
            <text:p>{"id":"2-32","name":"曹操","imageUrl":"https://one-draw.jp/ijinden/cardlist/002/card/02_032.png","expansion":25,"type":1,"color":8,"term":8,"orderTable":164,"orderDeck":111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P166];[$HTML.$D$1];[.$G166];[$HTML.$E$1];[.$I166];[$HTML.$F$1];[.$K166];[$HTML.$G$1];[.$O166];[$HTML.$H$1];[.$A166];[$HTML.$I$1];[.$B166];[$HTML.$J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46}," calcext:value-type="string">
            <text:p>{"id":"2-33","name":"張角","imageUrl":"https://one-draw.jp/ijinden/cardlist/002/card/02_033.png","expansion":25,"type":1,"color":8,"term":0,"orderTable":165,"orderDeck":46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P167];[$HTML.$D$1];[.$G167];[$HTML.$E$1];[.$I167];[$HTML.$F$1];[.$K167];[$HTML.$G$1];[.$O167];[$HTML.$H$1];[.$A167];[$HTML.$I$1];[.$B167];[$HTML.$J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78}," calcext:value-type="string">
            <text:p>{"id":"2-34","name":"劉備","imageUrl":"https://one-draw.jp/ijinden/cardlist/002/card/02_034.png","expansion":25,"type":1,"color":8,"term":0,"orderTable":166,"orderDeck":78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P168];[$HTML.$D$1];[.$G168];[$HTML.$E$1];[.$I168];[$HTML.$F$1];[.$K168];[$HTML.$G$1];[.$O168];[$HTML.$H$1];[.$A168];[$HTML.$I$1];[.$B168];[$HTML.$J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43}," calcext:value-type="string">
            <text:p>{"id":"2-35","name":"司馬懿","imageUrl":"https://one-draw.jp/ijinden/cardlist/002/card/02_035.png","expansion":25,"type":1,"color":8,"term":0,"orderTable":167,"orderDeck":143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P169];[$HTML.$D$1];[.$G169];[$HTML.$E$1];[.$I169];[$HTML.$F$1];[.$K169];[$HTML.$G$1];[.$O169];[$HTML.$H$1];[.$A169];[$HTML.$I$1];[.$B169];[$HTML.$J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176}," calcext:value-type="string">
            <text:p>{"id":"2-36","name":"足利義政","imageUrl":"https://one-draw.jp/ijinden/cardlist/002/card/02_036.png","expansion":25,"type":1,"color":8,"term":0,"orderTable":168,"orderDeck":176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P170];[$HTML.$D$1];[.$G170];[$HTML.$E$1];[.$I170];[$HTML.$F$1];[.$K170];[$HTML.$G$1];[.$O170];[$HTML.$H$1];[.$A170];[$HTML.$I$1];[.$B170];[$HTML.$J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192}," calcext:value-type="string">
            <text:p>{"id":"2-37","name":"姜維","imageUrl":"https://one-draw.jp/ijinden/cardlist/002/card/02_037.png","expansion":25,"type":1,"color":8,"term":0,"orderTable":169,"orderDeck":19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P171];[$HTML.$D$1];[.$G171];[$HTML.$E$1];[.$I171];[$HTML.$F$1];[.$K171];[$HTML.$G$1];[.$O171];[$HTML.$H$1];[.$A171];[$HTML.$I$1];[.$B171];[$HTML.$J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185}," calcext:value-type="string">
            <text:p>{"id":"2-38","name":"裴松之","imageUrl":"https://one-draw.jp/ijinden/cardlist/002/card/02_038.png","expansion":25,"type":1,"color":8,"term":2,"orderTable":170,"orderDeck":18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P172];[$HTML.$D$1];[.$G172];[$HTML.$E$1];[.$I172];[$HTML.$F$1];[.$K172];[$HTML.$G$1];[.$O172];[$HTML.$H$1];[.$A172];[$HTML.$I$1];[.$B172];[$HTML.$J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5}," calcext:value-type="string">
            <text:p>{"id":"2-39","name":"陳寿","imageUrl":"https://one-draw.jp/ijinden/cardlist/002/card/02_039.png","expansion":25,"type":1,"color":8,"term":2,"orderTable":171,"orderDeck":15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P173];[$HTML.$D$1];[.$G173];[$HTML.$E$1];[.$I173];[$HTML.$F$1];[.$K173];[$HTML.$G$1];[.$O173];[$HTML.$H$1];[.$A173];[$HTML.$I$1];[.$B173];[$HTML.$J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6}," calcext:value-type="string">
            <text:p>{"id":"2-40","name":"足利尊氏","imageUrl":"https://one-draw.jp/ijinden/cardlist/002/card/02_040.png","expansion":25,"type":1,"color":8,"term":0,"orderTable":172,"orderDeck":16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P174];[$HTML.$D$1];[.$G174];[$HTML.$E$1];[.$I174];[$HTML.$F$1];[.$K174];[$HTML.$G$1];[.$O174];[$HTML.$H$1];[.$A174];[$HTML.$I$1];[.$B174];[$HTML.$J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7}," calcext:value-type="string">
            <text:p>{"id":"2-41","name":"カール・マルクス","imageUrl":"https://one-draw.jp/ijinden/cardlist/002/card/02_041.png","expansion":25,"type":1,"color":8,"term":0,"orderTable":173,"orderDeck":17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P175];[$HTML.$D$1];[.$G175];[$HTML.$E$1];[.$I175];[$HTML.$F$1];[.$K175];[$HTML.$G$1];[.$O175];[$HTML.$H$1];[.$A175];[$HTML.$I$1];[.$B175];[$HTML.$J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79}," calcext:value-type="string">
            <text:p>{"id":"2-42","name":"足利義満","imageUrl":"https://one-draw.jp/ijinden/cardlist/002/card/02_042.png","expansion":25,"type":1,"color":8,"term":0,"orderTable":174,"orderDeck":79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P176];[$HTML.$D$1];[.$G176];[$HTML.$E$1];[.$I176];[$HTML.$F$1];[.$K176];[$HTML.$G$1];[.$O176];[$HTML.$H$1];[.$A176];[$HTML.$I$1];[.$B176];[$HTML.$J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80}," calcext:value-type="string">
            <text:p>{"id":"2-43","name":"観阿弥","imageUrl":"https://one-draw.jp/ijinden/cardlist/002/card/02_043.png","expansion":25,"type":1,"color":8,"term":0,"orderTable":175,"orderDeck":80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P177];[$HTML.$D$1];[.$G177];[$HTML.$E$1];[.$I177];[$HTML.$F$1];[.$K177];[$HTML.$G$1];[.$O177];[$HTML.$H$1];[.$A177];[$HTML.$I$1];[.$B177];[$HTML.$J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12}," calcext:value-type="string">
            <text:p>{"id":"2-44","name":"世阿弥","imageUrl":"https://one-draw.jp/ijinden/cardlist/002/card/02_044.png","expansion":25,"type":1,"color":8,"term":0,"orderTable":176,"orderDeck":112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P178];[$HTML.$D$1];[.$G178];[$HTML.$E$1];[.$I178];[$HTML.$F$1];[.$K178];[$HTML.$G$1];[.$O178];[$HTML.$H$1];[.$A178];[$HTML.$I$1];[.$B178];[$HTML.$J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47}," calcext:value-type="string">
            <text:p>{"id":"2-45","name":"新井白石","imageUrl":"https://one-draw.jp/ijinden/cardlist/002/card/02_045.png","expansion":25,"type":1,"color":8,"term":0,"orderTable":177,"orderDeck":47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P179];[$HTML.$D$1];[.$G179];[$HTML.$E$1];[.$I179];[$HTML.$F$1];[.$K179];[$HTML.$G$1];[.$O179];[$HTML.$H$1];[.$A179];[$HTML.$I$1];[.$B179];[$HTML.$J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13}," calcext:value-type="string">
            <text:p>{"id":"2-46","name":"孫夫人","imageUrl":"https://one-draw.jp/ijinden/cardlist/002/card/02_046.png","expansion":25,"type":1,"color":8,"term":0,"orderTable":178,"orderDeck":113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P180];[$HTML.$D$1];[.$G180];[$HTML.$E$1];[.$I180];[$HTML.$F$1];[.$K180];[$HTML.$G$1];[.$O180];[$HTML.$H$1];[.$A180];[$HTML.$I$1];[.$B180];[$HTML.$J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81}," calcext:value-type="string">
            <text:p>{"id":"2-47","name":"法然","imageUrl":"https://one-draw.jp/ijinden/cardlist/002/card/02_047.png","expansion":25,"type":1,"color":8,"term":0,"orderTable":179,"orderDeck":81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P181];[$HTML.$D$1];[.$G181];[$HTML.$E$1];[.$I181];[$HTML.$F$1];[.$K181];[$HTML.$G$1];[.$O181];[$HTML.$H$1];[.$A181];[$HTML.$I$1];[.$B181];[$HTML.$J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44}," calcext:value-type="string">
            <text:p>{"id":"2-48","name":"一遍","imageUrl":"https://one-draw.jp/ijinden/cardlist/002/card/02_048.png","expansion":25,"type":1,"color":8,"term":0,"orderTable":180,"orderDeck":144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P182];[$HTML.$D$1];[.$G182];[$HTML.$E$1];[.$I182];[$HTML.$F$1];[.$K182];[$HTML.$G$1];[.$O182];[$HTML.$H$1];[.$A182];[$HTML.$I$1];[.$B182];[$HTML.$J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4,&quot;orderTable&quot;:181,&quot;orderDeck&quot;:197}," calcext:value-type="string">
            <text:p>{"id":"2-49","name":"籠城戦","imageUrl":"https://one-draw.jp/ijinden/cardlist/002/card/02_049.png","expansion":25,"type":2,"color":1,"term":4,"orderTable":181,"orderDeck":197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P183];[$HTML.$D$1];[.$G183];[$HTML.$E$1];[.$I183];[$HTML.$F$1];[.$K183];[$HTML.$G$1];[.$O183];[$HTML.$H$1];[.$A183];[$HTML.$I$1];[.$B183];[$HTML.$J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18}," calcext:value-type="string">
            <text:p>{"id":"2-50","name":"安宅船","imageUrl":"https://one-draw.jp/ijinden/cardlist/002/card/02_050.png","expansion":25,"type":2,"color":1,"term":0,"orderTable":182,"orderDeck":218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P184];[$HTML.$D$1];[.$G184];[$HTML.$E$1];[.$I184];[$HTML.$F$1];[.$K184];[$HTML.$G$1];[.$O184];[$HTML.$H$1];[.$A184];[$HTML.$I$1];[.$B184];[$HTML.$J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14}," calcext:value-type="string">
            <text:p>{"id":"2-51","name":"リヴァイアサン","imageUrl":"https://one-draw.jp/ijinden/cardlist/002/card/02_051.png","expansion":25,"type":2,"color":2,"term":0,"orderTable":183,"orderDeck":214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P185];[$HTML.$D$1];[.$G185];[$HTML.$E$1];[.$I185];[$HTML.$F$1];[.$K185];[$HTML.$G$1];[.$O185];[$HTML.$H$1];[.$A185];[$HTML.$I$1];[.$B185];[$HTML.$J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24}," calcext:value-type="string">
            <text:p>{"id":"2-52","name":"ガレオン船","imageUrl":"https://one-draw.jp/ijinden/cardlist/002/card/02_052.png","expansion":25,"type":2,"color":2,"term":0,"orderTable":184,"orderDeck":22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P186];[$HTML.$D$1];[.$G186];[$HTML.$E$1];[.$I186];[$HTML.$F$1];[.$K186];[$HTML.$G$1];[.$O186];[$HTML.$H$1];[.$A186];[$HTML.$I$1];[.$B186];[$HTML.$J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00}," calcext:value-type="string">
            <text:p>{"id":"2-53","name":"仁王","imageUrl":"https://one-draw.jp/ijinden/cardlist/002/card/02_053.png","expansion":25,"type":2,"color":4,"term":0,"orderTable":185,"orderDeck":200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P187];[$HTML.$D$1];[.$G187];[$HTML.$E$1];[.$I187];[$HTML.$F$1];[.$K187];[$HTML.$G$1];[.$O187];[$HTML.$H$1];[.$A187];[$HTML.$I$1];[.$B187];[$HTML.$J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28}," calcext:value-type="string">
            <text:p>{"id":"2-54","name":"蒸気機関車","imageUrl":"https://one-draw.jp/ijinden/cardlist/002/card/02_054.png","expansion":25,"type":2,"color":4,"term":0,"orderTable":186,"orderDeck":228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P188];[$HTML.$D$1];[.$G188];[$HTML.$E$1];[.$I188];[$HTML.$F$1];[.$K188];[$HTML.$G$1];[.$O188];[$HTML.$H$1];[.$A188];[$HTML.$I$1];[.$B188];[$HTML.$J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02}," calcext:value-type="string">
            <text:p>{"id":"2-55","name":"凱旋門","imageUrl":"https://one-draw.jp/ijinden/cardlist/002/card/02_055.png","expansion":25,"type":2,"color":8,"term":0,"orderTable":187,"orderDeck":202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P189];[$HTML.$D$1];[.$G189];[$HTML.$E$1];[.$I189];[$HTML.$F$1];[.$K189];[$HTML.$G$1];[.$O189];[$HTML.$H$1];[.$A189];[$HTML.$I$1];[.$B189];[$HTML.$J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10}," calcext:value-type="string">
            <text:p>{"id":"2-56","name":"三層の舎利殿","imageUrl":"https://one-draw.jp/ijinden/cardlist/002/card/02_056.png","expansion":25,"type":2,"color":8,"term":0,"orderTable":188,"orderDeck":210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P190];[$HTML.$D$1];[.$G190];[$HTML.$E$1];[.$I190];[$HTML.$F$1];[.$K190];[$HTML.$G$1];[.$O190];[$HTML.$H$1];[.$A190];[$HTML.$I$1];[.$B190];[$HTML.$J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0,&quot;orderTable&quot;:189,&quot;orderDeck&quot;:268}," calcext:value-type="string">
            <text:p>{"id":"2-57","name":"スペクター","imageUrl":"https://one-draw.jp/ijinden/cardlist/002/card/02_057.png","expansion":25,"type":3,"color":1,"term":0,"orderTable":189,"orderDeck":268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P191];[$HTML.$D$1];[.$G191];[$HTML.$E$1];[.$I191];[$HTML.$F$1];[.$K191];[$HTML.$G$1];[.$O191];[$HTML.$H$1];[.$A191];[$HTML.$I$1];[.$B191];[$HTML.$J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32}," calcext:value-type="string">
            <text:p>{"id":"2-58","name":"クイック","imageUrl":"https://one-draw.jp/ijinden/cardlist/002/card/02_058.png","expansion":25,"type":3,"color":1,"term":0,"orderTable":190,"orderDeck":23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P192];[$HTML.$D$1];[.$G192];[$HTML.$E$1];[.$I192];[$HTML.$F$1];[.$K192];[$HTML.$G$1];[.$O192];[$HTML.$H$1];[.$A192];[$HTML.$I$1];[.$B192];[$HTML.$J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246}," calcext:value-type="string">
            <text:p>{"id":"2-59","name":"サモン","imageUrl":"https://one-draw.jp/ijinden/cardlist/002/card/02_059.png","expansion":25,"type":3,"color":1,"term":0,"orderTable":191,"orderDeck":24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P193];[$HTML.$D$1];[.$G193];[$HTML.$E$1];[.$I193];[$HTML.$F$1];[.$K193];[$HTML.$G$1];[.$O193];[$HTML.$H$1];[.$A193];[$HTML.$I$1];[.$B193];[$HTML.$J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35}," calcext:value-type="string">
            <text:p>{"id":"2-60","name":"フェイス","imageUrl":"https://one-draw.jp/ijinden/cardlist/002/card/02_060.png","expansion":25,"type":3,"color":2,"term":0,"orderTable":192,"orderDeck":23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P194];[$HTML.$D$1];[.$G194];[$HTML.$E$1];[.$I194];[$HTML.$F$1];[.$K194];[$HTML.$G$1];[.$O194];[$HTML.$H$1];[.$A194];[$HTML.$I$1];[.$B194];[$HTML.$J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36}," calcext:value-type="string">
            <text:p>{"id":"2-61","name":"リドロー","imageUrl":"https://one-draw.jp/ijinden/cardlist/002/card/02_061.png","expansion":25,"type":3,"color":2,"term":0,"orderTable":193,"orderDeck":23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P195];[$HTML.$D$1];[.$G195];[$HTML.$E$1];[.$I195];[$HTML.$F$1];[.$K195];[$HTML.$G$1];[.$O195];[$HTML.$H$1];[.$A195];[$HTML.$I$1];[.$B195];[$HTML.$J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257}," calcext:value-type="string">
            <text:p>{"id":"2-62","name":"テンペスト","imageUrl":"https://one-draw.jp/ijinden/cardlist/002/card/02_062.png","expansion":25,"type":3,"color":2,"term":0,"orderTable":194,"orderDeck":257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P196];[$HTML.$D$1];[.$G196];[$HTML.$E$1];[.$I196];[$HTML.$F$1];[.$K196];[$HTML.$G$1];[.$O196];[$HTML.$H$1];[.$A196];[$HTML.$I$1];[.$B196];[$HTML.$J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259}," calcext:value-type="string">
            <text:p>{"id":"2-63","name":"ミューテイション","imageUrl":"https://one-draw.jp/ijinden/cardlist/002/card/02_063.png","expansion":25,"type":3,"color":4,"term":0,"orderTable":195,"orderDeck":259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P197];[$HTML.$D$1];[.$G197];[$HTML.$E$1];[.$I197];[$HTML.$F$1];[.$K197];[$HTML.$G$1];[.$O197];[$HTML.$H$1];[.$A197];[$HTML.$I$1];[.$B197];[$HTML.$J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264}," calcext:value-type="string">
            <text:p>{"id":"2-64","name":"ライブラリー","imageUrl":"https://one-draw.jp/ijinden/cardlist/002/card/02_064.png","expansion":25,"type":3,"color":4,"term":0,"orderTable":196,"orderDeck":264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P198];[$HTML.$D$1];[.$G198];[$HTML.$E$1];[.$I198];[$HTML.$F$1];[.$K198];[$HTML.$G$1];[.$O198];[$HTML.$H$1];[.$A198];[$HTML.$I$1];[.$B198];[$HTML.$J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29}," calcext:value-type="string">
            <text:p>{"id":"2-65","name":"チャージ","imageUrl":"https://one-draw.jp/ijinden/cardlist/002/card/02_065.png","expansion":25,"type":3,"color":4,"term":0,"orderTable":197,"orderDeck":229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P199];[$HTML.$D$1];[.$G199];[$HTML.$E$1];[.$I199];[$HTML.$F$1];[.$K199];[$HTML.$G$1];[.$O199];[$HTML.$H$1];[.$A199];[$HTML.$I$1];[.$B199];[$HTML.$J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265}," calcext:value-type="string">
            <text:p>{"id":"2-66","name":"カタストロフィ","imageUrl":"https://one-draw.jp/ijinden/cardlist/002/card/02_066.png","expansion":25,"type":3,"color":8,"term":0,"orderTable":198,"orderDeck":265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P200];[$HTML.$D$1];[.$G200];[$HTML.$E$1];[.$I200];[$HTML.$F$1];[.$K200];[$HTML.$G$1];[.$O200];[$HTML.$H$1];[.$A200];[$HTML.$I$1];[.$B200];[$HTML.$J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250}," calcext:value-type="string">
            <text:p>{"id":"2-67","name":"エクスキューション","imageUrl":"https://one-draw.jp/ijinden/cardlist/002/card/02_067.png","expansion":25,"type":3,"color":8,"term":0,"orderTable":199,"orderDeck":250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P201];[$HTML.$D$1];[.$G201];[$HTML.$E$1];[.$I201];[$HTML.$F$1];[.$K201];[$HTML.$G$1];[.$O201];[$HTML.$H$1];[.$A201];[$HTML.$I$1];[.$B201];[$HTML.$J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260}," calcext:value-type="string">
            <text:p>{"id":"2-68","name":"メロウ","imageUrl":"https://one-draw.jp/ijinden/cardlist/002/card/02_068.png","expansion":25,"type":3,"color":8,"term":0,"orderTable":200,"orderDeck":260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P202];[$HTML.$D$1];[.$G202];[$HTML.$E$1];[.$I202];[$HTML.$F$1];[.$K202];[$HTML.$G$1];[.$O202];[$HTML.$H$1];[.$A202];[$HTML.$I$1];[.$B202];[$HTML.$J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0,&quot;orderTable&quot;:201,&quot;orderDeck&quot;:251}," calcext:value-type="string">
            <text:p>{"id":"2-69","name":"スカーレット","imageUrl":"https://one-draw.jp/ijinden/cardlist/002/card/02_069.png","expansion":25,"type":3,"color":8,"term":0,"orderTable":201,"orderDeck":251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P203];[$HTML.$D$1];[.$G203];[$HTML.$E$1];[.$I203];[$HTML.$F$1];[.$K203];[$HTML.$G$1];[.$O203];[$HTML.$H$1];[.$A203];[$HTML.$I$1];[.$B203];[$HTML.$J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0,&quot;orderTable&quot;:202,&quot;orderDeck&quot;:252}," calcext:value-type="string">
            <text:p>{"id":"2-70","name":"ピーコック","imageUrl":"https://one-draw.jp/ijinden/cardlist/002/card/02_070.png","expansion":25,"type":3,"color":8,"term":0,"orderTable":202,"orderDeck":252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P204];[$HTML.$D$1];[.$G204];[$HTML.$E$1];[.$I204];[$HTML.$F$1];[.$K204];[$HTML.$G$1];[.$O204];[$HTML.$H$1];[.$A204];[$HTML.$I$1];[.$B204];[$HTML.$J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0,&quot;orderTable&quot;:203,&quot;orderDeck&quot;:253}," calcext:value-type="string">
            <text:p>{"id":"2-71","name":"シャトルーズ","imageUrl":"https://one-draw.jp/ijinden/cardlist/002/card/02_071.png","expansion":25,"type":3,"color":8,"term":0,"orderTable":203,"orderDeck":253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P205];[$HTML.$D$1];[.$G205];[$HTML.$E$1];[.$I205];[$HTML.$F$1];[.$K205];[$HTML.$G$1];[.$O205];[$HTML.$H$1];[.$A205];[$HTML.$I$1];[.$B205];[$HTML.$J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287}," calcext:value-type="string">
            <text:p>{"id":"2-72","name":"サンドグラス","imageUrl":"https://one-draw.jp/ijinden/cardlist/002/card/02_072.png","expansion":25,"type":4,"color":8,"term":0,"orderTable":204,"orderDeck":287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P206];[$HTML.$D$1];[.$G206];[$HTML.$E$1];[.$I206];[$HTML.$F$1];[.$K206];[$HTML.$G$1];[.$O206];[$HTML.$H$1];[.$A206];[$HTML.$I$1];[.$B206];[$HTML.$J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288}," calcext:value-type="string">
            <text:p>{"id":"2-73","name":"シルククローク","imageUrl":"https://one-draw.jp/ijinden/cardlist/002/card/02_073.png","expansion":25,"type":4,"color":8,"term":0,"orderTable":205,"orderDeck":288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P207];[$HTML.$D$1];[.$G207];[$HTML.$E$1];[.$I207];[$HTML.$F$1];[.$K207];[$HTML.$G$1];[.$O207];[$HTML.$H$1];[.$A207];[$HTML.$I$1];[.$B207];[$HTML.$J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03}," calcext:value-type="string">
            <text:p>{"id":"2-74","name":"イエローオーブ","imageUrl":"https://one-draw.jp/ijinden/cardlist/002/card/02_074.png","expansion":25,"type":4,"color":8,"term":0,"orderTable":206,"orderDeck":303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P208];[$HTML.$D$1];[.$G208];[$HTML.$E$1];[.$I208];[$HTML.$F$1];[.$K208];[$HTML.$G$1];[.$O208];[$HTML.$H$1];[.$A208];[$HTML.$I$1];[.$B208];[$HTML.$J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295}," calcext:value-type="string">
            <text:p>{"id":"2-75","name":"RYマーブルストーン","imageUrl":"https://one-draw.jp/ijinden/cardlist/002/card/02_075.png","expansion":25,"type":4,"color":41,"term":0,"orderTable":207,"orderDeck":295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P209];[$HTML.$D$1];[.$G209];[$HTML.$E$1];[.$I209];[$HTML.$F$1];[.$K209];[$HTML.$G$1];[.$O209];[$HTML.$H$1];[.$A209];[$HTML.$I$1];[.$B209];[$HTML.$J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296}," calcext:value-type="string">
            <text:p>{"id":"2-76","name":"BYマーブルストーン","imageUrl":"https://one-draw.jp/ijinden/cardlist/002/card/02_076.png","expansion":25,"type":4,"color":42,"term":0,"orderTable":208,"orderDeck":296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P210];[$HTML.$D$1];[.$G210];[$HTML.$E$1];[.$I210];[$HTML.$F$1];[.$K210];[$HTML.$G$1];[.$O210];[$HTML.$H$1];[.$A210];[$HTML.$I$1];[.$B210];[$HTML.$J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297}," calcext:value-type="string">
            <text:p>{"id":"2-77","name":"GYマーブルストーン","imageUrl":"https://one-draw.jp/ijinden/cardlist/002/card/02_077.png","expansion":25,"type":4,"color":44,"term":0,"orderTable":209,"orderDeck":297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P211];[$HTML.$D$1];[.$G211];[$HTML.$E$1];[.$I211];[$HTML.$F$1];[.$K211];[$HTML.$G$1];[.$O211];[$HTML.$H$1];[.$A211];[$HTML.$I$1];[.$B211];[$HTML.$J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05}," calcext:value-type="string">
            <text:p>{"id":"2-78","name":"RYマーブルオーブ","imageUrl":"https://one-draw.jp/ijinden/cardlist/002/card/02_078.png","expansion":25,"type":4,"color":41,"term":0,"orderTable":210,"orderDeck":305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P212];[$HTML.$D$1];[.$G212];[$HTML.$E$1];[.$I212];[$HTML.$F$1];[.$K212];[$HTML.$G$1];[.$O212];[$HTML.$H$1];[.$A212];[$HTML.$I$1];[.$B212];[$HTML.$J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06}," calcext:value-type="string">
            <text:p>{"id":"2-79","name":"BYマーブルオーブ","imageUrl":"https://one-draw.jp/ijinden/cardlist/002/card/02_079.png","expansion":25,"type":4,"color":42,"term":0,"orderTable":211,"orderDeck":306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P213];[$HTML.$D$1];[.$G213];[$HTML.$E$1];[.$I213];[$HTML.$F$1];[.$K213];[$HTML.$G$1];[.$O213];[$HTML.$H$1];[.$A213];[$HTML.$I$1];[.$B213];[$HTML.$J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07}," calcext:value-type="string">
            <text:p>{"id":"2-80","name":"GYマーブルオーブ","imageUrl":"https://one-draw.jp/ijinden/cardlist/002/card/02_080.png","expansion":25,"type":4,"color":44,"term":0,"orderTable":212,"orderDeck":307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P214];[$HTML.$D$1];[.$G214];[$HTML.$E$1];[.$I214];[$HTML.$F$1];[.$K214];[$HTML.$G$1];[.$O214];[$HTML.$H$1];[.$A214];[$HTML.$I$1];[.$B214];[$HTML.$J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14}," calcext:value-type="string">
            <text:p>{"id":"P-1","name":"マリ・キュリー","imageUrl":"https://one-draw.jp/ijinden/cardlist/P01/card/03_P_001.png","expansion":30,"type":1,"color":16,"term":0,"orderTable":213,"orderDeck":114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P215];[$HTML.$D$1];[.$G215];[$HTML.$E$1];[.$I215];[$HTML.$F$1];[.$K215];[$HTML.$G$1];[.$O215];[$HTML.$H$1];[.$A215];[$HTML.$I$1];[.$B215];[$HTML.$J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19}," calcext:value-type="string">
            <text:p>{"id":"P-2","name":"篤姫","imageUrl":"https://one-draw.jp/ijinden/cardlist/P01/card/03_P_002.png","expansion":30,"type":1,"color":16,"term":0,"orderTable":214,"orderDeck":19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P216];[$HTML.$D$1];[.$G216];[$HTML.$E$1];[.$I216];[$HTML.$F$1];[.$K216];[$HTML.$G$1];[.$O216];[$HTML.$H$1];[.$A216];[$HTML.$I$1];[.$B216];[$HTML.$J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49}," calcext:value-type="string">
            <text:p>{"id":"P-3","name":"李成桂","imageUrl":"https://one-draw.jp/ijinden/cardlist/P01/card/03_P_003.png","expansion":30,"type":1,"color":16,"term":0,"orderTable":215,"orderDeck":49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P217];[$HTML.$D$1];[.$G217];[$HTML.$E$1];[.$I217];[$HTML.$F$1];[.$K217];[$HTML.$G$1];[.$O217];[$HTML.$H$1];[.$A217];[$HTML.$I$1];[.$B217];[$HTML.$J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15}," calcext:value-type="string">
            <text:p>{"id":"P-4","name":"杉田玄白","imageUrl":"https://one-draw.jp/ijinden/cardlist/P01/card/03_P_004.png","expansion":30,"type":1,"color":16,"term":0,"orderTable":216,"orderDeck":115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P218];[$HTML.$D$1];[.$G218];[$HTML.$E$1];[.$I218];[$HTML.$F$1];[.$K218];[$HTML.$G$1];[.$O218];[$HTML.$H$1];[.$A218];[$HTML.$I$1];[.$B218];[$HTML.$J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0}," calcext:value-type="string">
            <text:p>{"id":"P-5","name":"渡辺崋山","imageUrl":"https://one-draw.jp/ijinden/cardlist/P01/card/03_P_005.png","expansion":30,"type":1,"color":16,"term":0,"orderTable":217,"orderDeck":50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P219];[$HTML.$D$1];[.$G219];[$HTML.$E$1];[.$I219];[$HTML.$F$1];[.$K219];[$HTML.$G$1];[.$O219];[$HTML.$H$1];[.$A219];[$HTML.$I$1];[.$B219];[$HTML.$J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83}," calcext:value-type="string">
            <text:p>{"id":"P-6","name":"緒方洪庵","imageUrl":"https://one-draw.jp/ijinden/cardlist/P01/card/03_P_006.png","expansion":30,"type":1,"color":16,"term":0,"orderTable":218,"orderDeck":83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P220];[$HTML.$D$1];[.$G220];[$HTML.$E$1];[.$I220];[$HTML.$F$1];[.$K220];[$HTML.$G$1];[.$O220];[$HTML.$H$1];[.$A220];[$HTML.$I$1];[.$B220];[$HTML.$J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47}," calcext:value-type="string">
            <text:p>{"id":"P-7","name":"岡田以蔵","imageUrl":"https://one-draw.jp/ijinden/cardlist/P01/card/03_P_007.png","expansion":30,"type":1,"color":16,"term":0,"orderTable":219,"orderDeck":14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P221];[$HTML.$D$1];[.$G221];[$HTML.$E$1];[.$I221];[$HTML.$F$1];[.$K221];[$HTML.$G$1];[.$O221];[$HTML.$H$1];[.$A221];[$HTML.$I$1];[.$B221];[$HTML.$J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84}," calcext:value-type="string">
            <text:p>{"id":"P-8","name":"クララ・バートン","imageUrl":"https://one-draw.jp/ijinden/cardlist/P01/card/03_P_008.png","expansion":30,"type":1,"color":16,"term":0,"orderTable":220,"orderDeck":84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P222];[$HTML.$D$1];[.$G222];[$HTML.$E$1];[.$I222];[$HTML.$F$1];[.$K222];[$HTML.$G$1];[.$O222];[$HTML.$H$1];[.$A222];[$HTML.$I$1];[.$B222];[$HTML.$J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26}," calcext:value-type="string">
            <text:p>{"id":"P-9","name":"虎狼痢","imageUrl":"https://one-draw.jp/ijinden/cardlist/P01/card/03_P_009.png","expansion":30,"type":2,"color":16,"term":0,"orderTable":221,"orderDeck":226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P223];[$HTML.$D$1];[.$G223];[$HTML.$E$1];[.$I223];[$HTML.$F$1];[.$K223];[$HTML.$G$1];[.$O223];[$HTML.$H$1];[.$A223];[$HTML.$I$1];[.$B223];[$HTML.$J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23}," calcext:value-type="string">
            <text:p>{"id":"P-10","name":"浪士集う長屋","imageUrl":"https://one-draw.jp/ijinden/cardlist/P01/card/03_P_010.png","expansion":30,"type":2,"color":16,"term":0,"orderTable":222,"orderDeck":223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P224];[$HTML.$D$1];[.$G224];[$HTML.$E$1];[.$I224];[$HTML.$F$1];[.$K224];[$HTML.$G$1];[.$O224];[$HTML.$H$1];[.$A224];[$HTML.$I$1];[.$B224];[$HTML.$J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31}," calcext:value-type="string">
            <text:p>{"id":"P-11","name":"スピリットアウェイ","imageUrl":"https://one-draw.jp/ijinden/cardlist/P01/card/03_P_011.png","expansion":30,"type":3,"color":16,"term":0,"orderTable":223,"orderDeck":231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P225];[$HTML.$D$1];[.$G225];[$HTML.$E$1];[.$I225];[$HTML.$F$1];[.$K225];[$HTML.$G$1];[.$O225];[$HTML.$H$1];[.$A225];[$HTML.$I$1];[.$B225];[$HTML.$J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261}," calcext:value-type="string">
            <text:p>{"id":"P-12","name":"タイムディレイション","imageUrl":"https://one-draw.jp/ijinden/cardlist/P01/card/03_P_012.png","expansion":30,"type":3,"color":16,"term":0,"orderTable":224,"orderDeck":261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P226];[$HTML.$D$1];[.$G226];[$HTML.$E$1];[.$I226];[$HTML.$F$1];[.$K226];[$HTML.$G$1];[.$O226];[$HTML.$H$1];[.$A226];[$HTML.$I$1];[.$B226];[$HTML.$J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290}," calcext:value-type="string">
            <text:p>{"id":"P-13","name":"ハンドミラー","imageUrl":"https://one-draw.jp/ijinden/cardlist/P01/card/03_P_013.png","expansion":30,"type":4,"color":16,"term":0,"orderTable":225,"orderDeck":290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P227];[$HTML.$D$1];[.$G227];[$HTML.$E$1];[.$I227];[$HTML.$F$1];[.$K227];[$HTML.$G$1];[.$O227];[$HTML.$H$1];[.$A227];[$HTML.$I$1];[.$B227];[$HTML.$J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291}," calcext:value-type="string">
            <text:p>{"id":"P-14","name":"ブラックブレイド","imageUrl":"https://one-draw.jp/ijinden/cardlist/P01/card/03_P_014.png","expansion":30,"type":4,"color":16,"term":0,"orderTable":226,"orderDeck":291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P228];[$HTML.$D$1];[.$G228];[$HTML.$E$1];[.$I228];[$HTML.$F$1];[.$K228];[$HTML.$G$1];[.$O228];[$HTML.$H$1];[.$A228];[$HTML.$I$1];[.$B228];[$HTML.$J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04}," calcext:value-type="string">
            <text:p>{"id":"P-15","name":"パープルオーブ","imageUrl":"https://one-draw.jp/ijinden/cardlist/P01/card/03_P_015.png","expansion":30,"type":4,"color":16,"term":0,"orderTable":227,"orderDeck":304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P229];[$HTML.$D$1];[.$G229];[$HTML.$E$1];[.$I229];[$HTML.$F$1];[.$K229];[$HTML.$G$1];[.$O229];[$HTML.$H$1];[.$A229];[$HTML.$I$1];[.$B229];[$HTML.$J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292}," calcext:value-type="string">
            <text:p>{"id":"P-16","name":"パープルストーン","imageUrl":"https://one-draw.jp/ijinden/cardlist/P01/card/03_P_016.png","expansion":30,"type":4,"color":16,"term":0,"orderTable":228,"orderDeck":292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P230];[$HTML.$D$1];[.$G230];[$HTML.$E$1];[.$I230];[$HTML.$F$1];[.$K230];[$HTML.$G$1];[.$O230];[$HTML.$H$1];[.$A230];[$HTML.$I$1];[.$B230];[$HTML.$J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25}," calcext:value-type="string">
            <text:p>{"id":"3-1","name":"宮本武蔵","imageUrl":"https://one-draw.jp/ijinden/cardlist/003/card/03_001.png","expansion":35,"type":1,"color":1,"term":0,"orderTable":229,"orderDeck":125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P231];[$HTML.$D$1];[.$G231];[$HTML.$E$1];[.$I231];[$HTML.$F$1];[.$K231];[$HTML.$G$1];[.$O231];[$HTML.$H$1];[.$A231];[$HTML.$I$1];[.$B231];[$HTML.$J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92}," calcext:value-type="string">
            <text:p>{"id":"3-2","name":"エリザベス1世","imageUrl":"https://one-draw.jp/ijinden/cardlist/003/card/03_002.png","expansion":35,"type":1,"color":1,"term":0,"orderTable":230,"orderDeck":92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P232];[$HTML.$D$1];[.$G232];[$HTML.$E$1];[.$I232];[$HTML.$F$1];[.$K232];[$HTML.$G$1];[.$O232];[$HTML.$H$1];[.$A232];[$HTML.$I$1];[.$B232];[$HTML.$J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169}," calcext:value-type="string">
            <text:p>{"id":"3-3","name":"エンリケ航海王子","imageUrl":"https://one-draw.jp/ijinden/cardlist/003/card/03_003.png","expansion":35,"type":1,"color":2,"term":0,"orderTable":231,"orderDeck":169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P233];[$HTML.$D$1];[.$G233];[$HTML.$E$1];[.$I233];[$HTML.$F$1];[.$K233];[$HTML.$G$1];[.$O233];[$HTML.$H$1];[.$A233];[$HTML.$I$1];[.$B233];[$HTML.$J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33}," calcext:value-type="string">
            <text:p>{"id":"3-4","name":"吉田松陰","imageUrl":"https://one-draw.jp/ijinden/cardlist/003/card/03_004.png","expansion":35,"type":1,"color":2,"term":0,"orderTable":232,"orderDeck":133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P234];[$HTML.$D$1];[.$G234];[$HTML.$E$1];[.$I234];[$HTML.$F$1];[.$K234];[$HTML.$G$1];[.$O234];[$HTML.$H$1];[.$A234];[$HTML.$I$1];[.$B234];[$HTML.$J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41}," calcext:value-type="string">
            <text:p>{"id":"3-5","name":"徳川光圀","imageUrl":"https://one-draw.jp/ijinden/cardlist/003/card/03_005.png","expansion":35,"type":1,"color":4,"term":2,"orderTable":233,"orderDeck":141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P235];[$HTML.$D$1];[.$G235];[$HTML.$E$1];[.$I235];[$HTML.$F$1];[.$K235];[$HTML.$G$1];[.$O235];[$HTML.$H$1];[.$A235];[$HTML.$I$1];[.$B235];[$HTML.$J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173}," calcext:value-type="string">
            <text:p>{"id":"3-6","name":"葛飾応為","imageUrl":"https://one-draw.jp/ijinden/cardlist/003/card/03_006.png","expansion":35,"type":1,"color":4,"term":0,"orderTable":234,"orderDeck":173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P236];[$HTML.$D$1];[.$G236];[$HTML.$E$1];[.$I236];[$HTML.$F$1];[.$K236];[$HTML.$G$1];[.$O236];[$HTML.$H$1];[.$A236];[$HTML.$I$1];[.$B236];[$HTML.$J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45}," calcext:value-type="string">
            <text:p>{"id":"3-7","name":"曹丕","imageUrl":"https://one-draw.jp/ijinden/cardlist/003/card/03_007.png","expansion":35,"type":1,"color":8,"term":2,"orderTable":235,"orderDeck":145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P237];[$HTML.$D$1];[.$G237];[$HTML.$E$1];[.$I237];[$HTML.$F$1];[.$K237];[$HTML.$G$1];[.$O237];[$HTML.$H$1];[.$A237];[$HTML.$I$1];[.$B237];[$HTML.$J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186}," calcext:value-type="string">
            <text:p>{"id":"3-8","name":"ジェーン・オースティン","imageUrl":"https://one-draw.jp/ijinden/cardlist/003/card/03_008.png","expansion":35,"type":1,"color":8,"term":2,"orderTable":236,"orderDeck":18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P238];[$HTML.$D$1];[.$G238];[$HTML.$E$1];[.$I238];[$HTML.$F$1];[.$K238];[$HTML.$G$1];[.$O238];[$HTML.$H$1];[.$A238];[$HTML.$I$1];[.$B238];[$HTML.$J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165}," calcext:value-type="string">
            <text:p>{"id":"3-9","name":"土方歳三","imageUrl":"https://one-draw.jp/ijinden/cardlist/003/card/03_009.png","expansion":35,"type":1,"color":16,"term":0,"orderTable":237,"orderDeck":165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P239];[$HTML.$D$1];[.$G239];[$HTML.$E$1];[.$I239];[$HTML.$F$1];[.$K239];[$HTML.$G$1];[.$O239];[$HTML.$H$1];[.$A239];[$HTML.$I$1];[.$B239];[$HTML.$J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51}," calcext:value-type="string">
            <text:p>{"id":"3-10","name":"武則天","imageUrl":"https://one-draw.jp/ijinden/cardlist/003/card/03_010.png","expansion":35,"type":1,"color":16,"term":0,"orderTable":238,"orderDeck":51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P240];[$HTML.$D$1];[.$G240];[$HTML.$E$1];[.$I240];[$HTML.$F$1];[.$K240];[$HTML.$G$1];[.$O240];[$HTML.$H$1];[.$A240];[$HTML.$I$1];[.$B240];[$HTML.$J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93}," calcext:value-type="string">
            <text:p>{"id":"3-11","name":"ウィリアム・セシル","imageUrl":"https://one-draw.jp/ijinden/cardlist/003/card/03_011.png","expansion":35,"type":1,"color":1,"term":0,"orderTable":239,"orderDeck":93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P241];[$HTML.$D$1];[.$G241];[$HTML.$E$1];[.$I241];[$HTML.$F$1];[.$K241];[$HTML.$G$1];[.$O241];[$HTML.$H$1];[.$A241];[$HTML.$I$1];[.$B241];[$HTML.$J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60}," calcext:value-type="string">
            <text:p>{"id":"3-12","name":"イーライ・ホイットニー","imageUrl":"https://one-draw.jp/ijinden/cardlist/003/card/03_012.png","expansion":35,"type":1,"color":1,"term":0,"orderTable":240,"orderDeck":60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P242];[$HTML.$D$1];[.$G242];[$HTML.$E$1];[.$I242];[$HTML.$F$1];[.$K242];[$HTML.$G$1];[.$O242];[$HTML.$H$1];[.$A242];[$HTML.$I$1];[.$B242];[$HTML.$J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7}," calcext:value-type="string">
            <text:p>{"id":"3-13","name":"平賀源内","imageUrl":"https://one-draw.jp/ijinden/cardlist/003/card/03_013.png","expansion":35,"type":1,"color":1,"term":0,"orderTable":241,"orderDeck":27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P243];[$HTML.$D$1];[.$G243];[$HTML.$E$1];[.$I243];[$HTML.$F$1];[.$K243];[$HTML.$G$1];[.$O243];[$HTML.$H$1];[.$A243];[$HTML.$I$1];[.$B243];[$HTML.$J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61}," calcext:value-type="string">
            <text:p>{"id":"3-14","name":"ジョージ・スチーブンソン","imageUrl":"https://one-draw.jp/ijinden/cardlist/003/card/03_014.png","expansion":35,"type":1,"color":1,"term":0,"orderTable":242,"orderDeck":61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P244];[$HTML.$D$1];[.$G244];[$HTML.$E$1];[.$I244];[$HTML.$F$1];[.$K244];[$HTML.$G$1];[.$O244];[$HTML.$H$1];[.$A244];[$HTML.$I$1];[.$B244];[$HTML.$J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26}," calcext:value-type="string">
            <text:p>{"id":"3-15","name":"淀殿","imageUrl":"https://one-draw.jp/ijinden/cardlist/003/card/03_015.png","expansion":35,"type":1,"color":1,"term":0,"orderTable":243,"orderDeck":126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P245];[$HTML.$D$1];[.$G245];[$HTML.$E$1];[.$I245];[$HTML.$F$1];[.$K245];[$HTML.$G$1];[.$O245];[$HTML.$H$1];[.$A245];[$HTML.$I$1];[.$B245];[$HTML.$J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P246];[$HTML.$D$1];[.$G246];[$HTML.$E$1];[.$I246];[$HTML.$F$1];[.$K246];[$HTML.$G$1];[.$O246];[$HTML.$H$1];[.$A246];[$HTML.$I$1];[.$B246];[$HTML.$J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4,&quot;orderTable&quot;:245,&quot;orderDeck&quot;:179}," calcext:value-type="string">
            <text:p>{"id":"3-17","name":"大塩平八郎","imageUrl":"https://one-draw.jp/ijinden/cardlist/003/card/03_017.png","expansion":35,"type":1,"color":1,"term":4,"orderTable":245,"orderDeck":17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P247];[$HTML.$D$1];[.$G247];[$HTML.$E$1];[.$I247];[$HTML.$F$1];[.$K247];[$HTML.$G$1];[.$O247];[$HTML.$H$1];[.$A247];[$HTML.$I$1];[.$B247];[$HTML.$J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51}," calcext:value-type="string">
            <text:p>{"id":"3-18","name":"水野忠邦","imageUrl":"https://one-draw.jp/ijinden/cardlist/003/card/03_018.png","expansion":35,"type":1,"color":1,"term":0,"orderTable":246,"orderDeck":151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P248];[$HTML.$D$1];[.$G248];[$HTML.$E$1];[.$I248];[$HTML.$F$1];[.$K248];[$HTML.$G$1];[.$O248];[$HTML.$H$1];[.$A248];[$HTML.$I$1];[.$B248];[$HTML.$J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180}," calcext:value-type="string">
            <text:p>{"id":"3-19","name":"伊達政宗","imageUrl":"https://one-draw.jp/ijinden/cardlist/003/card/03_019.png","expansion":35,"type":1,"color":2,"term":0,"orderTable":247,"orderDeck":18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P249];[$HTML.$D$1];[.$G249];[$HTML.$E$1];[.$I249];[$HTML.$F$1];[.$K249];[$HTML.$G$1];[.$O249];[$HTML.$H$1];[.$A249];[$HTML.$I$1];[.$B249];[$HTML.$J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55}," calcext:value-type="string">
            <text:p>{"id":"3-20","name":"バルトロメウ=ディアス","imageUrl":"https://one-draw.jp/ijinden/cardlist/003/card/03_020.png","expansion":35,"type":1,"color":2,"term":1,"orderTable":248,"orderDeck":155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P250];[$HTML.$D$1];[.$G250];[$HTML.$E$1];[.$I250];[$HTML.$F$1];[.$K250];[$HTML.$G$1];[.$O250];[$HTML.$H$1];[.$A250];[$HTML.$I$1];[.$B250];[$HTML.$J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P251];[$HTML.$D$1];[.$G251];[$HTML.$E$1];[.$I251];[$HTML.$F$1];[.$K251];[$HTML.$G$1];[.$O251];[$HTML.$H$1];[.$A251];[$HTML.$I$1];[.$B251];[$HTML.$J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8,&quot;orderTable&quot;:250,&quot;orderDeck&quot;:36}," calcext:value-type="string">
            <text:p>{"id":"3-22","name":"高杉晋作","imageUrl":"https://one-draw.jp/ijinden/cardlist/003/card/03_022.png","expansion":35,"type":1,"color":2,"term":8,"orderTable":250,"orderDeck":36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P252];[$HTML.$D$1];[.$G252];[$HTML.$E$1];[.$I252];[$HTML.$F$1];[.$K252];[$HTML.$G$1];[.$O252];[$HTML.$H$1];[.$A252];[$HTML.$I$1];[.$B252];[$HTML.$J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01}," calcext:value-type="string">
            <text:p>{"id":"3-23","name":"トマス・ニューコメン","imageUrl":"https://one-draw.jp/ijinden/cardlist/003/card/03_023.png","expansion":35,"type":1,"color":2,"term":0,"orderTable":251,"orderDeck":10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P253];[$HTML.$D$1];[.$G253];[$HTML.$E$1];[.$I253];[$HTML.$F$1];[.$K253];[$HTML.$G$1];[.$O253];[$HTML.$H$1];[.$A253];[$HTML.$I$1];[.$B253];[$HTML.$J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34}," calcext:value-type="string">
            <text:p>{"id":"3-24","name":"アダム・ラクスマン","imageUrl":"https://one-draw.jp/ijinden/cardlist/003/card/03_024.png","expansion":35,"type":1,"color":2,"term":0,"orderTable":252,"orderDeck":134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P254];[$HTML.$D$1];[.$G254];[$HTML.$E$1];[.$I254];[$HTML.$F$1];[.$K254];[$HTML.$G$1];[.$O254];[$HTML.$H$1];[.$A254];[$HTML.$I$1];[.$B254];[$HTML.$J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37}," calcext:value-type="string">
            <text:p>{"id":"3-25","name":"大黒屋光太夫","imageUrl":"https://one-draw.jp/ijinden/cardlist/003/card/03_025.png","expansion":35,"type":1,"color":2,"term":1,"orderTable":253,"orderDeck":37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P255];[$HTML.$D$1];[.$G255];[$HTML.$E$1];[.$I255];[$HTML.$F$1];[.$K255];[$HTML.$G$1];[.$O255];[$HTML.$H$1];[.$A255];[$HTML.$I$1];[.$B255];[$HTML.$J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P256];[$HTML.$D$1];[.$G256];[$HTML.$E$1];[.$I256];[$HTML.$F$1];[.$K256];[$HTML.$G$1];[.$O256];[$HTML.$H$1];[.$A256];[$HTML.$I$1];[.$B256];[$HTML.$J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76}," calcext:value-type="string">
            <text:p>{"id":"3-27","name":"小野小町","imageUrl":"https://one-draw.jp/ijinden/cardlist/003/card/03_027.png","expansion":35,"type":1,"color":4,"term":2,"orderTable":255,"orderDeck":76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P257];[$HTML.$D$1];[.$G257];[$HTML.$E$1];[.$I257];[$HTML.$F$1];[.$K257];[$HTML.$G$1];[.$O257];[$HTML.$H$1];[.$A257];[$HTML.$I$1];[.$B257];[$HTML.$J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77}," calcext:value-type="string">
            <text:p>{"id":"3-28","name":"松尾芭蕉","imageUrl":"https://one-draw.jp/ijinden/cardlist/003/card/03_028.png","expansion":35,"type":1,"color":4,"term":2,"orderTable":256,"orderDeck":77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P258];[$HTML.$D$1];[.$G258];[$HTML.$E$1];[.$I258];[$HTML.$F$1];[.$K258];[$HTML.$G$1];[.$O258];[$HTML.$H$1];[.$A258];[$HTML.$I$1];[.$B258];[$HTML.$J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08}," calcext:value-type="string">
            <text:p>{"id":"3-29","name":"朱舜水","imageUrl":"https://one-draw.jp/ijinden/cardlist/003/card/03_029.png","expansion":35,"type":1,"color":4,"term":0,"orderTable":257,"orderDeck":108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P259];[$HTML.$D$1];[.$G259];[$HTML.$E$1];[.$I259];[$HTML.$F$1];[.$K259];[$HTML.$G$1];[.$O259];[$HTML.$H$1];[.$A259];[$HTML.$I$1];[.$B259];[$HTML.$J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2}," calcext:value-type="string">
            <text:p>{"id":"3-30","name":"井原西鶴","imageUrl":"https://one-draw.jp/ijinden/cardlist/003/card/03_030.png","expansion":35,"type":1,"color":4,"term":2,"orderTable":258,"orderDeck":42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P260];[$HTML.$D$1];[.$G260];[$HTML.$E$1];[.$I260];[$HTML.$F$1];[.$K260];[$HTML.$G$1];[.$O260];[$HTML.$H$1];[.$A260];[$HTML.$I$1];[.$B260];[$HTML.$J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191}," calcext:value-type="string">
            <text:p>{"id":"3-31","name":"近松門左衛門","imageUrl":"https://one-draw.jp/ijinden/cardlist/003/card/03_031.png","expansion":35,"type":1,"color":4,"term":2,"orderTable":259,"orderDeck":19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P261];[$HTML.$D$1];[.$G261];[$HTML.$E$1];[.$I261];[$HTML.$F$1];[.$K261];[$HTML.$G$1];[.$O261];[$HTML.$H$1];[.$A261];[$HTML.$I$1];[.$B261];[$HTML.$J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3}," calcext:value-type="string">
            <text:p>{"id":"3-32","name":"田沼意次","imageUrl":"https://one-draw.jp/ijinden/cardlist/003/card/03_032.png","expansion":35,"type":1,"color":4,"term":0,"orderTable":260,"orderDeck":13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P262];[$HTML.$D$1];[.$G262];[$HTML.$E$1];[.$I262];[$HTML.$F$1];[.$K262];[$HTML.$G$1];[.$O262];[$HTML.$H$1];[.$A262];[$HTML.$I$1];[.$B262];[$HTML.$J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3}," calcext:value-type="string">
            <text:p>{"id":"3-33","name":"高野長英","imageUrl":"https://one-draw.jp/ijinden/cardlist/003/card/03_033.png","expansion":35,"type":1,"color":4,"term":0,"orderTable":261,"orderDeck":43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P263];[$HTML.$D$1];[.$G263];[$HTML.$E$1];[.$I263];[$HTML.$F$1];[.$K263];[$HTML.$G$1];[.$O263];[$HTML.$H$1];[.$A263];[$HTML.$I$1];[.$B263];[$HTML.$J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61}," calcext:value-type="string">
            <text:p>{"id":"3-34","name":"菱川師宣","imageUrl":"https://one-draw.jp/ijinden/cardlist/003/card/03_034.png","expansion":35,"type":1,"color":4,"term":0,"orderTable":262,"orderDeck":161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P264];[$HTML.$D$1];[.$G264];[$HTML.$E$1];[.$I264];[$HTML.$F$1];[.$K264];[$HTML.$G$1];[.$O264];[$HTML.$H$1];[.$A264];[$HTML.$I$1];[.$B264];[$HTML.$J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46}," calcext:value-type="string">
            <text:p>{"id":"3-35","name":"徳川吉宗","imageUrl":"https://one-draw.jp/ijinden/cardlist/003/card/03_035.png","expansion":35,"type":1,"color":8,"term":0,"orderTable":263,"orderDeck":146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P265];[$HTML.$D$1];[.$G265];[$HTML.$E$1];[.$I265];[$HTML.$F$1];[.$K265];[$HTML.$G$1];[.$O265];[$HTML.$H$1];[.$A265];[$HTML.$I$1];[.$B265];[$HTML.$J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8}," calcext:value-type="string">
            <text:p>{"id":"3-36","name":"雪舟","imageUrl":"https://one-draw.jp/ijinden/cardlist/003/card/03_036.png","expansion":35,"type":1,"color":8,"term":0,"orderTable":264,"orderDeck":18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P266];[$HTML.$D$1];[.$G266];[$HTML.$E$1];[.$I266];[$HTML.$F$1];[.$K266];[$HTML.$G$1];[.$O266];[$HTML.$H$1];[.$A266];[$HTML.$I$1];[.$B266];[$HTML.$J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64}," calcext:value-type="string">
            <text:p>{"id":"3-37","name":"俵屋宗達","imageUrl":"https://one-draw.jp/ijinden/cardlist/003/card/03_037.png","expansion":35,"type":1,"color":8,"term":0,"orderTable":265,"orderDeck":164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P267];[$HTML.$D$1];[.$G267];[$HTML.$E$1];[.$I267];[$HTML.$F$1];[.$K267];[$HTML.$G$1];[.$O267];[$HTML.$H$1];[.$A267];[$HTML.$I$1];[.$B267];[$HTML.$J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193}," calcext:value-type="string">
            <text:p>{"id":"3-38","name":"司馬炎","imageUrl":"https://one-draw.jp/ijinden/cardlist/003/card/03_038.png","expansion":35,"type":1,"color":8,"term":0,"orderTable":266,"orderDeck":19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P268];[$HTML.$D$1];[.$G268];[$HTML.$E$1];[.$I268];[$HTML.$F$1];[.$K268];[$HTML.$G$1];[.$O268];[$HTML.$H$1];[.$A268];[$HTML.$I$1];[.$B268];[$HTML.$J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187}," calcext:value-type="string">
            <text:p>{"id":"3-39","name":"井伊直弼","imageUrl":"https://one-draw.jp/ijinden/cardlist/003/card/03_039.png","expansion":35,"type":1,"color":8,"term":0,"orderTable":267,"orderDeck":18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P269];[$HTML.$D$1];[.$G269];[$HTML.$E$1];[.$I269];[$HTML.$F$1];[.$K269];[$HTML.$G$1];[.$O269];[$HTML.$H$1];[.$A269];[$HTML.$I$1];[.$B269];[$HTML.$J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82}," calcext:value-type="string">
            <text:p>{"id":"3-40","name":"徳川家茂","imageUrl":"https://one-draw.jp/ijinden/cardlist/003/card/03_040.png","expansion":35,"type":1,"color":8,"term":0,"orderTable":268,"orderDeck":82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P270];[$HTML.$D$1];[.$G270];[$HTML.$E$1];[.$I270];[$HTML.$F$1];[.$K270];[$HTML.$G$1];[.$O270];[$HTML.$H$1];[.$A270];[$HTML.$I$1];[.$B270];[$HTML.$J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177}," calcext:value-type="string">
            <text:p>{"id":"3-41","name":"松平定信","imageUrl":"https://one-draw.jp/ijinden/cardlist/003/card/03_041.png","expansion":35,"type":1,"color":8,"term":0,"orderTable":269,"orderDeck":177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P271];[$HTML.$D$1];[.$G271];[$HTML.$E$1];[.$I271];[$HTML.$F$1];[.$K271];[$HTML.$G$1];[.$O271];[$HTML.$H$1];[.$A271];[$HTML.$I$1];[.$B271];[$HTML.$J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48}," calcext:value-type="string">
            <text:p>{"id":"3-42","name":"ルイス・キャロル","imageUrl":"https://one-draw.jp/ijinden/cardlist/003/card/03_042.png","expansion":35,"type":1,"color":8,"term":2,"orderTable":270,"orderDeck":48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P272];[$HTML.$D$1];[.$G272];[$HTML.$E$1];[.$I272];[$HTML.$F$1];[.$K272];[$HTML.$G$1];[.$O272];[$HTML.$H$1];[.$A272];[$HTML.$I$1];[.$B272];[$HTML.$J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0}," calcext:value-type="string">
            <text:p>{"id":"3-43","name":"芹沢鴨","imageUrl":"https://one-draw.jp/ijinden/cardlist/003/card/03_043.png","expansion":35,"type":1,"color":16,"term":0,"orderTable":271,"orderDeck":20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P273];[$HTML.$D$1];[.$G273];[$HTML.$E$1];[.$I273];[$HTML.$F$1];[.$K273];[$HTML.$G$1];[.$O273];[$HTML.$H$1];[.$A273];[$HTML.$I$1];[.$B273];[$HTML.$J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16}," calcext:value-type="string">
            <text:p>{"id":"3-44","name":"本居宣長","imageUrl":"https://one-draw.jp/ijinden/cardlist/003/card/03_044.png","expansion":35,"type":1,"color":16,"term":0,"orderTable":272,"orderDeck":116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P274];[$HTML.$D$1];[.$G274];[$HTML.$E$1];[.$I274];[$HTML.$F$1];[.$K274];[$HTML.$G$1];[.$O274];[$HTML.$H$1];[.$A274];[$HTML.$I$1];[.$B274];[$HTML.$J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85}," calcext:value-type="string">
            <text:p>{"id":"3-45","name":"坂本龍馬","imageUrl":"https://one-draw.jp/ijinden/cardlist/003/card/03_045.png","expansion":35,"type":1,"color":16,"term":0,"orderTable":273,"orderDeck":85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P275];[$HTML.$D$1];[.$G275];[$HTML.$E$1];[.$I275];[$HTML.$F$1];[.$K275];[$HTML.$G$1];[.$O275];[$HTML.$H$1];[.$A275];[$HTML.$I$1];[.$B275];[$HTML.$J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178}," calcext:value-type="string">
            <text:p>{"id":"3-46","name":"近藤勇","imageUrl":"https://one-draw.jp/ijinden/cardlist/003/card/03_046.png","expansion":35,"type":1,"color":16,"term":0,"orderTable":274,"orderDeck":17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P276];[$HTML.$D$1];[.$G276];[$HTML.$E$1];[.$I276];[$HTML.$F$1];[.$K276];[$HTML.$G$1];[.$O276];[$HTML.$H$1];[.$A276];[$HTML.$I$1];[.$B276];[$HTML.$J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1}," calcext:value-type="string">
            <text:p>{"id":"3-47","name":"徳川慶喜","imageUrl":"https://one-draw.jp/ijinden/cardlist/003/card/03_047.png","expansion":35,"type":1,"color":16,"term":0,"orderTable":275,"orderDeck":21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P277];[$HTML.$D$1];[.$G277];[$HTML.$E$1];[.$I277];[$HTML.$F$1];[.$K277];[$HTML.$G$1];[.$O277];[$HTML.$H$1];[.$A277];[$HTML.$I$1];[.$B277];[$HTML.$J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17}," calcext:value-type="string">
            <text:p>{"id":"3-48","name":"マシュー・カルブレイス・ペリー","imageUrl":"https://one-draw.jp/ijinden/cardlist/003/card/03_048.png","expansion":35,"type":1,"color":16,"term":1,"orderTable":276,"orderDeck":117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P278];[$HTML.$D$1];[.$G278];[$HTML.$E$1];[.$I278];[$HTML.$F$1];[.$K278];[$HTML.$G$1];[.$O278];[$HTML.$H$1];[.$A278];[$HTML.$I$1];[.$B278];[$HTML.$J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188}," calcext:value-type="string">
            <text:p>{"id":"3-49","name":"タウンゼント・ハリス","imageUrl":"https://one-draw.jp/ijinden/cardlist/003/card/03_049.png","expansion":35,"type":1,"color":16,"term":1,"orderTable":277,"orderDeck":18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P279];[$HTML.$D$1];[.$G279];[$HTML.$E$1];[.$I279];[$HTML.$F$1];[.$K279];[$HTML.$G$1];[.$O279];[$HTML.$H$1];[.$A279];[$HTML.$I$1];[.$B279];[$HTML.$J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86}," calcext:value-type="string">
            <text:p>{"id":"3-50","name":"勝海舟","imageUrl":"https://one-draw.jp/ijinden/cardlist/003/card/03_050.png","expansion":35,"type":1,"color":16,"term":0,"orderTable":278,"orderDeck":86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P280];[$HTML.$D$1];[.$G280];[$HTML.$E$1];[.$I280];[$HTML.$F$1];[.$K280];[$HTML.$G$1];[.$O280];[$HTML.$H$1];[.$A280];[$HTML.$I$1];[.$B280];[$HTML.$J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05}," calcext:value-type="string">
            <text:p>{"id":"3-51","name":"炎上がる天守閣","imageUrl":"https://one-draw.jp/ijinden/cardlist/003/card/03_051.png","expansion":35,"type":2,"color":1,"term":0,"orderTable":279,"orderDeck":205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P281];[$HTML.$D$1];[.$G281];[$HTML.$E$1];[.$I281];[$HTML.$F$1];[.$K281];[$HTML.$G$1];[.$O281];[$HTML.$H$1];[.$A281];[$HTML.$I$1];[.$B281];[$HTML.$J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195}," calcext:value-type="string">
            <text:p>{"id":"3-52","name":"天下分け目の主戦場","imageUrl":"https://one-draw.jp/ijinden/cardlist/003/card/03_052.png","expansion":35,"type":2,"color":1,"term":0,"orderTable":280,"orderDeck":195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P282];[$HTML.$D$1];[.$G282];[$HTML.$E$1];[.$I282];[$HTML.$F$1];[.$K282];[$HTML.$G$1];[.$O282];[$HTML.$H$1];[.$A282];[$HTML.$I$1];[.$B282];[$HTML.$J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15}," calcext:value-type="string">
            <text:p>{"id":"3-53","name":"永遠の帝都","imageUrl":"https://one-draw.jp/ijinden/cardlist/003/card/03_053.png","expansion":35,"type":2,"color":2,"term":0,"orderTable":281,"orderDeck":215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P283];[$HTML.$D$1];[.$G283];[$HTML.$E$1];[.$I283];[$HTML.$F$1];[.$K283];[$HTML.$G$1];[.$O283];[$HTML.$H$1];[.$A283];[$HTML.$I$1];[.$B283];[$HTML.$J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20}," calcext:value-type="string">
            <text:p>{"id":"3-54","name":"暴風岬","imageUrl":"https://one-draw.jp/ijinden/cardlist/003/card/03_054.png","expansion":35,"type":2,"color":2,"term":0,"orderTable":282,"orderDeck":220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P284];[$HTML.$D$1];[.$G284];[$HTML.$E$1];[.$I284];[$HTML.$F$1];[.$K284];[$HTML.$G$1];[.$O284];[$HTML.$H$1];[.$A284];[$HTML.$I$1];[.$B284];[$HTML.$J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08}," calcext:value-type="string">
            <text:p>{"id":"3-55","name":"商館並ぶ人工島","imageUrl":"https://one-draw.jp/ijinden/cardlist/003/card/03_055.png","expansion":35,"type":2,"color":4,"term":0,"orderTable":283,"orderDeck":208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P285];[$HTML.$D$1];[.$G285];[$HTML.$E$1];[.$I285];[$HTML.$F$1];[.$K285];[$HTML.$G$1];[.$O285];[$HTML.$H$1];[.$A285];[$HTML.$I$1];[.$B285];[$HTML.$J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0,&quot;orderTable&quot;:284,&quot;orderDeck&quot;:222}," calcext:value-type="string">
            <text:p>{"id":"3-56","name":"志士の藩校","imageUrl":"https://one-draw.jp/ijinden/cardlist/003/card/03_056.png","expansion":35,"type":2,"color":4,"term":0,"orderTable":284,"orderDeck":222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P286];[$HTML.$D$1];[.$G286];[$HTML.$E$1];[.$I286];[$HTML.$F$1];[.$K286];[$HTML.$G$1];[.$O286];[$HTML.$H$1];[.$A286];[$HTML.$I$1];[.$B286];[$HTML.$J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17}," calcext:value-type="string">
            <text:p>{"id":"3-57","name":"風神雷神図","imageUrl":"https://one-draw.jp/ijinden/cardlist/003/card/03_057.png","expansion":35,"type":2,"color":8,"term":0,"orderTable":285,"orderDeck":217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P287];[$HTML.$D$1];[.$G287];[$HTML.$E$1];[.$I287];[$HTML.$F$1];[.$K287];[$HTML.$G$1];[.$O287];[$HTML.$H$1];[.$A287];[$HTML.$I$1];[.$B287];[$HTML.$J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11}," calcext:value-type="string">
            <text:p>{"id":"3-58","name":"茅葺き屋根の張出し舞台","imageUrl":"https://one-draw.jp/ijinden/cardlist/003/card/03_058.png","expansion":35,"type":2,"color":8,"term":0,"orderTable":286,"orderDeck":211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P288];[$HTML.$D$1];[.$G288];[$HTML.$E$1];[.$I288];[$HTML.$F$1];[.$K288];[$HTML.$G$1];[.$O288];[$HTML.$H$1];[.$A288];[$HTML.$I$1];[.$B288];[$HTML.$J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03}," calcext:value-type="string">
            <text:p>{"id":"3-59","name":"森閑たる離宮","imageUrl":"https://one-draw.jp/ijinden/cardlist/003/card/03_059.png","expansion":35,"type":2,"color":16,"term":0,"orderTable":287,"orderDeck":203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P289];[$HTML.$D$1];[.$G289];[$HTML.$E$1];[.$I289];[$HTML.$F$1];[.$K289];[$HTML.$G$1];[.$O289];[$HTML.$H$1];[.$A289];[$HTML.$I$1];[.$B289];[$HTML.$J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27}," calcext:value-type="string">
            <text:p>{"id":"3-60","name":"黒船","imageUrl":"https://one-draw.jp/ijinden/cardlist/003/card/03_060.png","expansion":35,"type":2,"color":16,"term":0,"orderTable":288,"orderDeck":227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P290];[$HTML.$D$1];[.$G290];[$HTML.$E$1];[.$I290];[$HTML.$F$1];[.$K290];[$HTML.$G$1];[.$O290];[$HTML.$H$1];[.$A290];[$HTML.$I$1];[.$B290];[$HTML.$J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267}," calcext:value-type="string">
            <text:p>{"id":"3-61","name":"サンダーボルト","imageUrl":"https://one-draw.jp/ijinden/cardlist/003/card/03_061.png","expansion":35,"type":3,"color":1,"term":0,"orderTable":289,"orderDeck":267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P291];[$HTML.$D$1];[.$G291];[$HTML.$E$1];[.$I291];[$HTML.$F$1];[.$K291];[$HTML.$G$1];[.$O291];[$HTML.$H$1];[.$A291];[$HTML.$I$1];[.$B291];[$HTML.$J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33}," calcext:value-type="string">
            <text:p>{"id":"3-62","name":"パイロオーラ","imageUrl":"https://one-draw.jp/ijinden/cardlist/003/card/03_062.png","expansion":35,"type":3,"color":1,"term":0,"orderTable":290,"orderDeck":23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P292];[$HTML.$D$1];[.$G292];[$HTML.$E$1];[.$I292];[$HTML.$F$1];[.$K292];[$HTML.$G$1];[.$O292];[$HTML.$H$1];[.$A292];[$HTML.$I$1];[.$B292];[$HTML.$J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269}," calcext:value-type="string">
            <text:p>{"id":"3-63","name":"アイオン","imageUrl":"https://one-draw.jp/ijinden/cardlist/003/card/03_063.png","expansion":35,"type":3,"color":2,"term":0,"orderTable":291,"orderDeck":269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P293];[$HTML.$D$1];[.$G293];[$HTML.$E$1];[.$I293];[$HTML.$F$1];[.$K293];[$HTML.$G$1];[.$O293];[$HTML.$H$1];[.$A293];[$HTML.$I$1];[.$B293];[$HTML.$J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37}," calcext:value-type="string">
            <text:p>{"id":"3-64","name":"ハイドロオーラ","imageUrl":"https://one-draw.jp/ijinden/cardlist/003/card/03_064.png","expansion":35,"type":3,"color":2,"term":0,"orderTable":292,"orderDeck":23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P294];[$HTML.$D$1];[.$G294];[$HTML.$E$1];[.$I294];[$HTML.$F$1];[.$K294];[$HTML.$G$1];[.$O294];[$HTML.$H$1];[.$A294];[$HTML.$I$1];[.$B294];[$HTML.$J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262}," calcext:value-type="string">
            <text:p>{"id":"3-65","name":"ソーサリー","imageUrl":"https://one-draw.jp/ijinden/cardlist/003/card/03_065.png","expansion":35,"type":3,"color":4,"term":0,"orderTable":293,"orderDeck":262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P295];[$HTML.$D$1];[.$G295];[$HTML.$E$1];[.$I295];[$HTML.$F$1];[.$K295];[$HTML.$G$1];[.$O295];[$HTML.$H$1];[.$A295];[$HTML.$I$1];[.$B295];[$HTML.$J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38}," calcext:value-type="string">
            <text:p>{"id":"3-66","name":"クロロオーラ","imageUrl":"https://one-draw.jp/ijinden/cardlist/003/card/03_066.png","expansion":35,"type":3,"color":4,"term":0,"orderTable":294,"orderDeck":23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P296];[$HTML.$D$1];[.$G296];[$HTML.$E$1];[.$I296];[$HTML.$F$1];[.$K296];[$HTML.$G$1];[.$O296];[$HTML.$H$1];[.$A296];[$HTML.$I$1];[.$B296];[$HTML.$J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39}," calcext:value-type="string">
            <text:p>{"id":"3-67","name":"パシフィック","imageUrl":"https://one-draw.jp/ijinden/cardlist/003/card/03_067.png","expansion":35,"type":3,"color":8,"term":0,"orderTable":295,"orderDeck":23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P297];[$HTML.$D$1];[.$G297];[$HTML.$E$1];[.$I297];[$HTML.$F$1];[.$K297];[$HTML.$G$1];[.$O297];[$HTML.$H$1];[.$A297];[$HTML.$I$1];[.$B297];[$HTML.$J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241}," calcext:value-type="string">
            <text:p>{"id":"3-68","name":"ジオオーラ","imageUrl":"https://one-draw.jp/ijinden/cardlist/003/card/03_068.png","expansion":35,"type":3,"color":8,"term":0,"orderTable":296,"orderDeck":24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P298];[$HTML.$D$1];[.$G298];[$HTML.$E$1];[.$I298];[$HTML.$F$1];[.$K298];[$HTML.$G$1];[.$O298];[$HTML.$H$1];[.$A298];[$HTML.$I$1];[.$B298];[$HTML.$J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254}," calcext:value-type="string">
            <text:p>{"id":"3-69","name":"コーザリティ","imageUrl":"https://one-draw.jp/ijinden/cardlist/003/card/03_069.png","expansion":35,"type":3,"color":16,"term":0,"orderTable":297,"orderDeck":254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P299];[$HTML.$D$1];[.$G299];[$HTML.$E$1];[.$I299];[$HTML.$F$1];[.$K299];[$HTML.$G$1];[.$O299];[$HTML.$H$1];[.$A299];[$HTML.$I$1];[.$B299];[$HTML.$J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242}," calcext:value-type="string">
            <text:p>{"id":"3-70","name":"エアロオーラ","imageUrl":"https://one-draw.jp/ijinden/cardlist/003/card/03_070.png","expansion":35,"type":3,"color":16,"term":0,"orderTable":298,"orderDeck":24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P300];[$HTML.$D$1];[.$G300];[$HTML.$E$1];[.$I300];[$HTML.$F$1];[.$K300];[$HTML.$G$1];[.$O300];[$HTML.$H$1];[.$A300];[$HTML.$I$1];[.$B300];[$HTML.$J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275}," calcext:value-type="string">
            <text:p>{"id":"3-71","name":"喜びの種","imageUrl":"https://one-draw.jp/ijinden/cardlist/003/card/03_071.png","expansion":35,"type":4,"color":1,"term":0,"orderTable":299,"orderDeck":275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P301];[$HTML.$D$1];[.$G301];[$HTML.$E$1];[.$I301];[$HTML.$F$1];[.$K301];[$HTML.$G$1];[.$O301];[$HTML.$H$1];[.$A301];[$HTML.$I$1];[.$B301];[$HTML.$J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280}," calcext:value-type="string">
            <text:p>{"id":"3-72","name":"怖れの種","imageUrl":"https://one-draw.jp/ijinden/cardlist/003/card/03_072.png","expansion":35,"type":4,"color":2,"term":0,"orderTable":300,"orderDeck":280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P302];[$HTML.$D$1];[.$G302];[$HTML.$E$1];[.$I302];[$HTML.$F$1];[.$K302];[$HTML.$G$1];[.$O302];[$HTML.$H$1];[.$A302];[$HTML.$I$1];[.$B302];[$HTML.$J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285}," calcext:value-type="string">
            <text:p>{"id":"3-73","name":"怒りの種","imageUrl":"https://one-draw.jp/ijinden/cardlist/003/card/03_073.png","expansion":35,"type":4,"color":4,"term":0,"orderTable":301,"orderDeck":285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P303];[$HTML.$D$1];[.$G303];[$HTML.$E$1];[.$I303];[$HTML.$F$1];[.$K303];[$HTML.$G$1];[.$O303];[$HTML.$H$1];[.$A303];[$HTML.$I$1];[.$B303];[$HTML.$J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289}," calcext:value-type="string">
            <text:p>{"id":"3-74","name":"苦しみの種","imageUrl":"https://one-draw.jp/ijinden/cardlist/003/card/03_074.png","expansion":35,"type":4,"color":8,"term":0,"orderTable":302,"orderDeck":289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P304];[$HTML.$D$1];[.$G304];[$HTML.$E$1];[.$I304];[$HTML.$F$1];[.$K304];[$HTML.$G$1];[.$O304];[$HTML.$H$1];[.$A304];[$HTML.$I$1];[.$B304];[$HTML.$J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293}," calcext:value-type="string">
            <text:p>{"id":"3-75","name":"悲しみの種","imageUrl":"https://one-draw.jp/ijinden/cardlist/003/card/03_075.png","expansion":35,"type":4,"color":16,"term":0,"orderTable":303,"orderDeck":293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P305];[$HTML.$D$1];[.$G305];[$HTML.$E$1];[.$I305];[$HTML.$F$1];[.$K305];[$HTML.$G$1];[.$O305];[$HTML.$H$1];[.$A305];[$HTML.$I$1];[.$B305];[$HTML.$J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294}," calcext:value-type="string">
            <text:p>{"id":"3-76","name":"ダンダラ羽織","imageUrl":"https://one-draw.jp/ijinden/cardlist/003/card/03_076.png","expansion":35,"type":4,"color":16,"term":0,"orderTable":304,"orderDeck":294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P306];[$HTML.$D$1];[.$G306];[$HTML.$E$1];[.$I306];[$HTML.$F$1];[.$K306];[$HTML.$G$1];[.$O306];[$HTML.$H$1];[.$A306];[$HTML.$I$1];[.$B306];[$HTML.$J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270}," calcext:value-type="string">
            <text:p>{"id":"3-77","name":"遁甲盤","imageUrl":"https://one-draw.jp/ijinden/cardlist/003/card/03_077.png","expansion":35,"type":4,"color":64,"term":0,"orderTable":305,"orderDeck":270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P307];[$HTML.$D$1];[.$G307];[$HTML.$E$1];[.$I307];[$HTML.$F$1];[.$K307];[$HTML.$G$1];[.$O307];[$HTML.$H$1];[.$A307];[$HTML.$I$1];[.$B307];[$HTML.$J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298}," calcext:value-type="string">
            <text:p>{"id":"3-78","name":"ホムンクルス","imageUrl":"https://one-draw.jp/ijinden/cardlist/003/card/03_078.png","expansion":35,"type":4,"color":64,"term":0,"orderTable":306,"orderDeck":298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P308];[$HTML.$D$1];[.$G308];[$HTML.$E$1];[.$I308];[$HTML.$F$1];[.$K308];[$HTML.$G$1];[.$O308];[$HTML.$H$1];[.$A308];[$HTML.$I$1];[.$B308];[$HTML.$J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299}," calcext:value-type="string">
            <text:p>{"id":"3-79","name":"ストーンマスク","imageUrl":"https://one-draw.jp/ijinden/cardlist/003/card/03_079.png","expansion":35,"type":4,"color":64,"term":0,"orderTable":307,"orderDeck":299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P309];[$HTML.$D$1];[.$G309];[$HTML.$E$1];[.$I309];[$HTML.$F$1];[.$K309];[$HTML.$G$1];[.$O309];[$HTML.$H$1];[.$A309];[$HTML.$I$1];[.$B309];[$HTML.$J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08}," calcext:value-type="string">
            <text:p>{"id":"3-80","name":"オブシディアン","imageUrl":"https://one-draw.jp/ijinden/cardlist/003/card/03_080.png","expansion":35,"type":4,"color":64,"term":0,"orderTable":308,"orderDeck":308},</text:p>
          </table:table-cell>
          <table:table-cell table:number-columns-repeated="16347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</table:table>
      <table:table table:name="HTML" table:style-name="ta1">
        <table:table-column table:style-name="co10" table:number-columns-repeated="10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Q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00/00/00</text:date>, <text:time style:data-style-name="N2" text:time-value="13:27:12.26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2-24T13:27:52.961000000</dc:date>
    <meta:editing-duration>PT7H42M28S</meta:editing-duration>
    <meta:editing-cycles>270</meta:editing-cycles>
    <meta:generator>LibreOffice/7.5.3.2$Windows_X86_64 LibreOffice_project/9f56dff12ba03b9acd7730a5a481eea045e468f3</meta:generator>
    <meta:document-statistic meta:table-count="6" meta:cell-count="5315" meta:object-count="0"/>
  </office:meta>
</office:document-meta>
</file>