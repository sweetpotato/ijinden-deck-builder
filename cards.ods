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9.4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48}," calcext:value-type="string">
            <text:p>{"id":"R-1","name":"上杉謙信","imageUrl":"https://one-draw.jp/ijinden/cardlist/R01/card/R_001.png","expansion":10,"type":1,"color":1,"term":0,"orderTable":1,"orderDeck":148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2}," calcext:value-type="string">
            <text:p>{"id":"R-3","name":"武田勝頼","imageUrl":"https://one-draw.jp/ijinden/cardlist/R01/card/R_003.png","expansion":10,"type":1,"color":1,"term":0,"orderTable":3,"orderDeck":22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52}," calcext:value-type="string">
            <text:p>{"id":"R-4","name":"ヴラド・ツェペシュ","imageUrl":"https://one-draw.jp/ijinden/cardlist/R01/card/R_004.png","expansion":10,"type":1,"color":1,"term":0,"orderTable":4,"orderDeck":52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87}," calcext:value-type="string">
            <text:p>{"id":"R-5","name":"坂上田村麻呂","imageUrl":"https://one-draw.jp/ijinden/cardlist/R01/card/R_005.png","expansion":10,"type":1,"color":1,"term":0,"orderTable":5,"orderDeck":87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18}," calcext:value-type="string">
            <text:p>{"id":"R-6","name":"楠木正成","imageUrl":"https://one-draw.jp/ijinden/cardlist/R01/card/R_006.png","expansion":10,"type":1,"color":1,"term":0,"orderTable":6,"orderDeck":118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19}," calcext:value-type="string">
            <text:p>{"id":"R-7","name":"ジェームズ・バトラー・ヒコック","imageUrl":"https://one-draw.jp/ijinden/cardlist/R01/card/R_007.png","expansion":10,"type":1,"color":1,"term":0,"orderTable":7,"orderDeck":119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49}," calcext:value-type="string">
            <text:p>{"id":"R-8","name":"アレクサンドロス大王","imageUrl":"https://one-draw.jp/ijinden/cardlist/R01/card/R_008.png","expansion":10,"type":1,"color":1,"term":0,"orderTable":8,"orderDeck":149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196}," calcext:value-type="string">
            <text:p>{"id":"R-9","name":"神剣眠る氏社","imageUrl":"https://one-draw.jp/ijinden/cardlist/R01/card/R_009.png","expansion":10,"type":2,"color":1,"term":0,"orderTable":9,"orderDeck":196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04}," calcext:value-type="string">
            <text:p>{"id":"R-10","name":"連なる天守閣","imageUrl":"https://one-draw.jp/ijinden/cardlist/R01/card/R_010.png","expansion":10,"type":2,"color":1,"term":0,"orderTable":10,"orderDeck":204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244}," calcext:value-type="string">
            <text:p>{"id":"R-11","name":"ロイヤリティ","imageUrl":"https://one-draw.jp/ijinden/cardlist/R01/card/R_011.png","expansion":10,"type":3,"color":1,"term":0,"orderTable":11,"orderDeck":24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245}," calcext:value-type="string">
            <text:p>{"id":"R-12","name":"デスペラード","imageUrl":"https://one-draw.jp/ijinden/cardlist/R01/card/R_012.png","expansion":10,"type":3,"color":1,"term":0,"orderTable":12,"orderDeck":24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271}," calcext:value-type="string">
            <text:p>{"id":"R-13","name":"レッドストーン","imageUrl":"https://one-draw.jp/ijinden/cardlist/R01/card/R_013.png","expansion":10,"type":4,"color":1,"term":0,"orderTable":13,"orderDeck":27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52}," calcext:value-type="string">
            <text:p>{"id":"B-1","name":"レオナルド・ダ・ヴィンチ","imageUrl":"https://one-draw.jp/ijinden/cardlist/B01/card/B_001.png","expansion":11,"type":1,"color":2,"term":0,"orderTable":14,"orderDeck":152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28}," calcext:value-type="string">
            <text:p>{"id":"B-3","name":"好太王","imageUrl":"https://one-draw.jp/ijinden/cardlist/B01/card/B_003.png","expansion":11,"type":1,"color":2,"term":0,"orderTable":16,"orderDeck":28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62}," calcext:value-type="string">
            <text:p>{"id":"B-4","name":"フェルディナンド・マゼラン","imageUrl":"https://one-draw.jp/ijinden/cardlist/B01/card/B_004.png","expansion":11,"type":1,"color":2,"term":1,"orderTable":17,"orderDeck":6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63}," calcext:value-type="string">
            <text:p>{"id":"B-5","name":"ラファエロ・サンティ","imageUrl":"https://one-draw.jp/ijinden/cardlist/B01/card/B_005.png","expansion":11,"type":1,"color":2,"term":0,"orderTable":18,"orderDeck":63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29}," calcext:value-type="string">
            <text:p>{"id":"B-6","name":"ジャン・カルヴァン","imageUrl":"https://one-draw.jp/ijinden/cardlist/B01/card/B_006.png","expansion":11,"type":1,"color":2,"term":0,"orderTable":19,"orderDeck":29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64}," calcext:value-type="string">
            <text:p>{"id":"B-7","name":"武帝","imageUrl":"https://one-draw.jp/ijinden/cardlist/B01/card/B_007.png","expansion":11,"type":1,"color":2,"term":0,"orderTable":20,"orderDeck":64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27}," calcext:value-type="string">
            <text:p>{"id":"B-8","name":"楊貴妃","imageUrl":"https://one-draw.jp/ijinden/cardlist/B01/card/B_008.png","expansion":11,"type":1,"color":2,"term":0,"orderTable":21,"orderDeck":1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198}," calcext:value-type="string">
            <text:p>{"id":"B-9","name":"モナ・リザ","imageUrl":"https://one-draw.jp/ijinden/cardlist/B01/card/B_009.png","expansion":11,"type":2,"color":2,"term":0,"orderTable":22,"orderDeck":19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06}," calcext:value-type="string">
            <text:p>{"id":"B-10","name":"革命の広場","imageUrl":"https://one-draw.jp/ijinden/cardlist/B01/card/B_010.png","expansion":11,"type":2,"color":2,"term":0,"orderTable":23,"orderDeck":206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247}," calcext:value-type="string">
            <text:p>{"id":"B-11","name":"フリート","imageUrl":"https://one-draw.jp/ijinden/cardlist/B01/card/B_011.png","expansion":11,"type":3,"color":2,"term":0,"orderTable":24,"orderDeck":24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248}," calcext:value-type="string">
            <text:p>{"id":"B-12","name":"ドローイング","imageUrl":"https://one-draw.jp/ijinden/cardlist/B01/card/B_012.png","expansion":11,"type":3,"color":2,"term":0,"orderTable":25,"orderDeck":24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276}," calcext:value-type="string">
            <text:p>{"id":"B-13","name":"ブルーストーン","imageUrl":"https://one-draw.jp/ijinden/cardlist/B01/card/B_013.png","expansion":11,"type":4,"color":2,"term":0,"orderTable":26,"orderDeck":276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35}," calcext:value-type="string">
            <text:p>{"id":"G-1","name":"出雲の阿国","imageUrl":"https://one-draw.jp/ijinden/cardlist/G01/card/G_001.png","expansion":12,"type":1,"color":4,"term":0,"orderTable":27,"orderDeck":135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1}," calcext:value-type="string">
            <text:p>{"id":"G-2","name":"卑弥呼","imageUrl":"https://one-draw.jp/ijinden/cardlist/G01/card/G_002.png","expansion":12,"type":1,"color":4,"term":0,"orderTable":28,"orderDeck":11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70}," calcext:value-type="string">
            <text:p>{"id":"G-3","name":"アテルイ","imageUrl":"https://one-draw.jp/ijinden/cardlist/G01/card/G_003.png","expansion":12,"type":1,"color":4,"term":0,"orderTable":29,"orderDeck":70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38}," calcext:value-type="string">
            <text:p>{"id":"G-4","name":"紀貫之","imageUrl":"https://one-draw.jp/ijinden/cardlist/G01/card/G_004.png","expansion":12,"type":1,"color":4,"term":2,"orderTable":30,"orderDeck":3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02}," calcext:value-type="string">
            <text:p>{"id":"G-5","name":"阿倍仲麻呂","imageUrl":"https://one-draw.jp/ijinden/cardlist/G01/card/G_005.png","expansion":12,"type":1,"color":4,"term":0,"orderTable":31,"orderDeck":102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71}," calcext:value-type="string">
            <text:p>{"id":"G-6","name":"葛飾北斎","imageUrl":"https://one-draw.jp/ijinden/cardlist/G01/card/G_006.png","expansion":12,"type":1,"color":4,"term":0,"orderTable":32,"orderDeck":71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03}," calcext:value-type="string">
            <text:p>{"id":"G-7","name":"藤原定家","imageUrl":"https://one-draw.jp/ijinden/cardlist/G01/card/G_007.png","expansion":12,"type":1,"color":4,"term":2,"orderTable":33,"orderDeck":103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181}," calcext:value-type="string">
            <text:p>{"id":"G-8","name":"最澄","imageUrl":"https://one-draw.jp/ijinden/cardlist/G01/card/G_008.png","expansion":12,"type":1,"color":4,"term":1,"orderTable":34,"orderDeck":18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16}," calcext:value-type="string">
            <text:p>{"id":"G-9","name":"阿弥陀堂","imageUrl":"https://one-draw.jp/ijinden/cardlist/G01/card/G_009.png","expansion":12,"type":2,"color":4,"term":0,"orderTable":35,"orderDeck":216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25}," calcext:value-type="string">
            <text:p>{"id":"G-10","name":"毘盧遮那仏像","imageUrl":"https://one-draw.jp/ijinden/cardlist/G01/card/G_010.png","expansion":12,"type":2,"color":4,"term":0,"orderTable":36,"orderDeck":225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249}," calcext:value-type="string">
            <text:p>{"id":"G-11","name":"グロウ","imageUrl":"https://one-draw.jp/ijinden/cardlist/G01/card/G_011.png","expansion":12,"type":3,"color":4,"term":0,"orderTable":37,"orderDeck":24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263}," calcext:value-type="string">
            <text:p>{"id":"G-12","name":"ギャザリング","imageUrl":"https://one-draw.jp/ijinden/cardlist/G01/card/G_012.png","expansion":12,"type":3,"color":4,"term":0,"orderTable":38,"orderDeck":263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281}," calcext:value-type="string">
            <text:p>{"id":"G-13","name":"グリーンストーン","imageUrl":"https://one-draw.jp/ijinden/cardlist/G01/card/G_013.png","expansion":12,"type":4,"color":4,"term":0,"orderTable":39,"orderDeck":281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88}," calcext:value-type="string">
            <text:p>{"id":"1-1","name":"織田信長","imageUrl":"https://one-draw.jp/ijinden/cardlist/001/card/01_001.png","expansion":15,"type":1,"color":1,"term":0,"orderTable":40,"orderDeck":88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20}," calcext:value-type="string">
            <text:p>{"id":"1-2","name":"クレオパトラ","imageUrl":"https://one-draw.jp/ijinden/cardlist/001/card/01_002.png","expansion":15,"type":1,"color":1,"term":0,"orderTable":41,"orderDeck":120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65}," calcext:value-type="string">
            <text:p>{"id":"1-3","name":"マルティン・ルター","imageUrl":"https://one-draw.jp/ijinden/cardlist/001/card/01_003.png","expansion":15,"type":1,"color":2,"term":0,"orderTable":42,"orderDeck":65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53}," calcext:value-type="string">
            <text:p>{"id":"1-4","name":"クリストファー・コロンブス","imageUrl":"https://one-draw.jp/ijinden/cardlist/001/card/01_004.png","expansion":15,"type":1,"color":2,"term":1,"orderTable":43,"orderDeck":153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170}," calcext:value-type="string">
            <text:p>{"id":"1-5","name":"ヴォルフガング・アマデウス・モーツァルト","imageUrl":"https://one-draw.jp/ijinden/cardlist/001/card/01_005.png","expansion":15,"type":1,"color":4,"term":0,"orderTable":44,"orderDeck":170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182}," calcext:value-type="string">
            <text:p>{"id":"1-6","name":"紫式部","imageUrl":"https://one-draw.jp/ijinden/cardlist/001/card/01_006.png","expansion":15,"type":1,"color":4,"term":2,"orderTable":45,"orderDeck":18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3}," calcext:value-type="string">
            <text:p>{"id":"1-8","name":"明智光秀","imageUrl":"https://one-draw.jp/ijinden/cardlist/001/card/01_008.png","expansion":15,"type":1,"color":1,"term":0,"orderTable":47,"orderDeck":23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4}," calcext:value-type="string">
            <text:p>{"id":"1-9","name":"藤原純友","imageUrl":"https://one-draw.jp/ijinden/cardlist/001/card/01_009.png","expansion":15,"type":1,"color":1,"term":1,"orderTable":48,"orderDeck":24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53}," calcext:value-type="string">
            <text:p>{"id":"1-10","name":"徳川家康","imageUrl":"https://one-draw.jp/ijinden/cardlist/001/card/01_010.png","expansion":15,"type":1,"color":1,"term":0,"orderTable":49,"orderDeck":53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54}," calcext:value-type="string">
            <text:p>{"id":"1-11","name":"直江兼続","imageUrl":"https://one-draw.jp/ijinden/cardlist/001/card/01_011.png","expansion":15,"type":1,"color":1,"term":0,"orderTable":50,"orderDeck":54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55}," calcext:value-type="string">
            <text:p>{"id":"1-12","name":"藤原頼通","imageUrl":"https://one-draw.jp/ijinden/cardlist/001/card/01_012.png","expansion":15,"type":1,"color":1,"term":2,"orderTable":51,"orderDeck":55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56}," calcext:value-type="string">
            <text:p>{"id":"1-13","name":"北条政子","imageUrl":"https://one-draw.jp/ijinden/cardlist/001/card/01_013.png","expansion":15,"type":1,"color":1,"term":0,"orderTable":52,"orderDeck":56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89}," calcext:value-type="string">
            <text:p>{"id":"1-14","name":"ジョージ・アームストロング・カスター","imageUrl":"https://one-draw.jp/ijinden/cardlist/001/card/01_014.png","expansion":15,"type":1,"color":1,"term":0,"orderTable":53,"orderDeck":89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90}," calcext:value-type="string">
            <text:p>{"id":"1-15","name":"中臣鎌足","imageUrl":"https://one-draw.jp/ijinden/cardlist/001/card/01_015.png","expansion":15,"type":1,"color":1,"term":0,"orderTable":54,"orderDeck":90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91}," calcext:value-type="string">
            <text:p>{"id":"1-16","name":"マルクス・アントニウス","imageUrl":"https://one-draw.jp/ijinden/cardlist/001/card/01_016.png","expansion":15,"type":1,"color":1,"term":0,"orderTable":55,"orderDeck":91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21}," calcext:value-type="string">
            <text:p>{"id":"1-17","name":"藤原道長","imageUrl":"https://one-draw.jp/ijinden/cardlist/001/card/01_017.png","expansion":15,"type":1,"color":1,"term":0,"orderTable":56,"orderDeck":121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22}," calcext:value-type="string">
            <text:p>{"id":"1-18","name":"源頼朝","imageUrl":"https://one-draw.jp/ijinden/cardlist/001/card/01_018.png","expansion":15,"type":1,"color":1,"term":0,"orderTable":57,"orderDeck":122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166}," calcext:value-type="string">
            <text:p>{"id":"1-19","name":"ガイウス・ユリウス・カエサル","imageUrl":"https://one-draw.jp/ijinden/cardlist/001/card/01_019.png","expansion":15,"type":1,"color":1,"term":0,"orderTable":58,"orderDeck":166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0}," calcext:value-type="string">
            <text:p>{"id":"1-21","name":"鑑真","imageUrl":"https://one-draw.jp/ijinden/cardlist/001/card/01_021.png","expansion":15,"type":1,"color":2,"term":1,"orderTable":60,"orderDeck":30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1}," calcext:value-type="string">
            <text:p>{"id":"1-22","name":"ジャンヌ・ダルク","imageUrl":"https://one-draw.jp/ijinden/cardlist/001/card/01_022.png","expansion":15,"type":1,"color":2,"term":0,"orderTable":61,"orderDeck":3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2}," calcext:value-type="string">
            <text:p>{"id":"1-23","name":"ドナテッロ","imageUrl":"https://one-draw.jp/ijinden/cardlist/001/card/01_023.png","expansion":15,"type":1,"color":2,"term":0,"orderTable":62,"orderDeck":32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66}," calcext:value-type="string">
            <text:p>{"id":"1-24","name":"孔子","imageUrl":"https://one-draw.jp/ijinden/cardlist/001/card/01_024.png","expansion":15,"type":1,"color":2,"term":0,"orderTable":63,"orderDeck":66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28}," calcext:value-type="string">
            <text:p>{"id":"1-25","name":"始皇帝","imageUrl":"https://one-draw.jp/ijinden/cardlist/001/card/01_025.png","expansion":15,"type":1,"color":2,"term":0,"orderTable":64,"orderDeck":128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67}," calcext:value-type="string">
            <text:p>{"id":"1-26","name":"メアリー1世","imageUrl":"https://one-draw.jp/ijinden/cardlist/001/card/01_026.png","expansion":15,"type":1,"color":2,"term":0,"orderTable":65,"orderDeck":67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94}," calcext:value-type="string">
            <text:p>{"id":"1-27","name":"玄宗","imageUrl":"https://one-draw.jp/ijinden/cardlist/001/card/01_027.png","expansion":15,"type":1,"color":2,"term":0,"orderTable":66,"orderDeck":9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95}," calcext:value-type="string">
            <text:p>{"id":"1-28","name":"シャルル7世","imageUrl":"https://one-draw.jp/ijinden/cardlist/001/card/01_028.png","expansion":15,"type":1,"color":2,"term":0,"orderTable":67,"orderDeck":9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96}," calcext:value-type="string">
            <text:p>{"id":"1-29","name":"フランシスコ・ザビエル","imageUrl":"https://one-draw.jp/ijinden/cardlist/001/card/01_029.png","expansion":15,"type":1,"color":2,"term":1,"orderTable":68,"orderDeck":9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29}," calcext:value-type="string">
            <text:p>{"id":"1-30","name":"チンギス・ハン","imageUrl":"https://one-draw.jp/ijinden/cardlist/001/card/01_030.png","expansion":15,"type":1,"color":2,"term":0,"orderTable":69,"orderDeck":129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30}," calcext:value-type="string">
            <text:p>{"id":"1-31","name":"ミケランジェロ","imageUrl":"https://one-draw.jp/ijinden/cardlist/001/card/01_031.png","expansion":15,"type":1,"color":2,"term":0,"orderTable":70,"orderDeck":130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54}," calcext:value-type="string">
            <text:p>{"id":"1-32","name":"マリー・アントワネット","imageUrl":"https://one-draw.jp/ijinden/cardlist/001/card/01_032.png","expansion":15,"type":1,"color":2,"term":0,"orderTable":71,"orderDeck":154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2}," calcext:value-type="string">
            <text:p>{"id":"1-33","name":"千利休","imageUrl":"https://one-draw.jp/ijinden/cardlist/001/card/01_033.png","expansion":15,"type":1,"color":4,"term":0,"orderTable":72,"orderDeck":12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39}," calcext:value-type="string">
            <text:p>{"id":"1-34","name":"狩野永徳","imageUrl":"https://one-draw.jp/ijinden/cardlist/001/card/01_034.png","expansion":15,"type":1,"color":4,"term":0,"orderTable":73,"orderDeck":39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72}," calcext:value-type="string">
            <text:p>{"id":"1-35","name":"安倍晴明","imageUrl":"https://one-draw.jp/ijinden/cardlist/001/card/01_035.png","expansion":15,"type":1,"color":4,"term":0,"orderTable":74,"orderDeck":72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73}," calcext:value-type="string">
            <text:p>{"id":"1-36","name":"吉田兼好","imageUrl":"https://one-draw.jp/ijinden/cardlist/001/card/01_036.png","expansion":15,"type":1,"color":4,"term":2,"orderTable":75,"orderDeck":7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04}," calcext:value-type="string">
            <text:p>{"id":"1-37","name":"蘆屋道満","imageUrl":"https://one-draw.jp/ijinden/cardlist/001/card/01_037.png","expansion":15,"type":1,"color":4,"term":0,"orderTable":76,"orderDeck":104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05}," calcext:value-type="string">
            <text:p>{"id":"1-38","name":"鴨長明","imageUrl":"https://one-draw.jp/ijinden/cardlist/001/card/01_038.png","expansion":15,"type":1,"color":4,"term":2,"orderTable":77,"orderDeck":105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06}," calcext:value-type="string">
            <text:p>{"id":"1-39","name":"ヨハン・ゼバスティアン・バッハ","imageUrl":"https://one-draw.jp/ijinden/cardlist/001/card/01_039.png","expansion":15,"type":1,"color":4,"term":0,"orderTable":78,"orderDeck":10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36}," calcext:value-type="string">
            <text:p>{"id":"1-40","name":"大伴家持","imageUrl":"https://one-draw.jp/ijinden/cardlist/001/card/01_040.png","expansion":15,"type":1,"color":4,"term":2,"orderTable":79,"orderDeck":136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37}," calcext:value-type="string">
            <text:p>{"id":"1-41","name":"フランツ・ペーター・シューベルト","imageUrl":"https://one-draw.jp/ijinden/cardlist/001/card/01_041.png","expansion":15,"type":1,"color":4,"term":0,"orderTable":80,"orderDeck":137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56}," calcext:value-type="string">
            <text:p>{"id":"1-42","name":"空海","imageUrl":"https://one-draw.jp/ijinden/cardlist/001/card/01_042.png","expansion":15,"type":1,"color":4,"term":1,"orderTable":81,"orderDeck":156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57}," calcext:value-type="string">
            <text:p>{"id":"1-43","name":"清少納言","imageUrl":"https://one-draw.jp/ijinden/cardlist/001/card/01_043.png","expansion":15,"type":1,"color":4,"term":2,"orderTable":82,"orderDeck":157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58}," calcext:value-type="string">
            <text:p>{"id":"1-44","name":"ルートヴィヒ・ヴァン・ベートーヴェン","imageUrl":"https://one-draw.jp/ijinden/cardlist/001/card/01_044.png","expansion":15,"type":1,"color":4,"term":0,"orderTable":83,"orderDeck":158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171}," calcext:value-type="string">
            <text:p>{"id":"1-45","name":"行基","imageUrl":"https://one-draw.jp/ijinden/cardlist/001/card/01_045.png","expansion":15,"type":1,"color":4,"term":0,"orderTable":84,"orderDeck":171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12}," calcext:value-type="string">
            <text:p>{"id":"1-46","name":"武者の蔵","imageUrl":"https://one-draw.jp/ijinden/cardlist/001/card/01_046.png","expansion":15,"type":2,"color":1,"term":0,"orderTable":85,"orderDeck":212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13}," calcext:value-type="string">
            <text:p>{"id":"1-47","name":"純白の塔","imageUrl":"https://one-draw.jp/ijinden/cardlist/001/card/01_047.png","expansion":15,"type":2,"color":2,"term":0,"orderTable":86,"orderDeck":213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19}," calcext:value-type="string">
            <text:p>{"id":"1-48","name":"円形闘技場","imageUrl":"https://one-draw.jp/ijinden/cardlist/001/card/01_048.png","expansion":15,"type":2,"color":2,"term":0,"orderTable":87,"orderDeck":219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199}," calcext:value-type="string">
            <text:p>{"id":"1-49","name":"巨大古墳","imageUrl":"https://one-draw.jp/ijinden/cardlist/001/card/01_049.png","expansion":15,"type":2,"color":4,"term":0,"orderTable":88,"orderDeck":199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07}," calcext:value-type="string">
            <text:p>{"id":"1-50","name":"魔除けの社","imageUrl":"https://one-draw.jp/ijinden/cardlist/001/card/01_050.png","expansion":15,"type":2,"color":4,"term":0,"orderTable":89,"orderDeck":207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21}," calcext:value-type="string">
            <text:p>{"id":"1-51","name":"冨嶽三十六景","imageUrl":"https://one-draw.jp/ijinden/cardlist/001/card/01_051.png","expansion":15,"type":2,"color":4,"term":0,"orderTable":90,"orderDeck":221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243}," calcext:value-type="string">
            <text:p>{"id":"1-52","name":"バレット","imageUrl":"https://one-draw.jp/ijinden/cardlist/001/card/01_052.png","expansion":15,"type":3,"color":1,"term":0,"orderTable":91,"orderDeck":24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255}," calcext:value-type="string">
            <text:p>{"id":"1-53","name":"チャンピオン","imageUrl":"https://one-draw.jp/ijinden/cardlist/001/card/01_053.png","expansion":15,"type":3,"color":1,"term":0,"orderTable":92,"orderDeck":255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266}," calcext:value-type="string">
            <text:p>{"id":"1-54","name":"ファイナルアタック","imageUrl":"https://one-draw.jp/ijinden/cardlist/001/card/01_054.png","expansion":15,"type":3,"color":1,"term":0,"orderTable":93,"orderDeck":266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34}," calcext:value-type="string">
            <text:p>{"id":"1-55","name":"ストーム","imageUrl":"https://one-draw.jp/ijinden/cardlist/001/card/01_055.png","expansion":15,"type":3,"color":2,"term":0,"orderTable":94,"orderDeck":23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256}," calcext:value-type="string">
            <text:p>{"id":"1-56","name":"リバイバル","imageUrl":"https://one-draw.jp/ijinden/cardlist/001/card/01_056.png","expansion":15,"type":3,"color":2,"term":0,"orderTable":95,"orderDeck":256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258}," calcext:value-type="string">
            <text:p>{"id":"1-57","name":"エイジング","imageUrl":"https://one-draw.jp/ijinden/cardlist/001/card/01_057.png","expansion":15,"type":3,"color":4,"term":0,"orderTable":96,"orderDeck":258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272}," calcext:value-type="string">
            <text:p>{"id":"1-58","name":"カンテラ","imageUrl":"https://one-draw.jp/ijinden/cardlist/001/card/01_058.png","expansion":15,"type":4,"color":1,"term":0,"orderTable":97,"orderDeck":272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273}," calcext:value-type="string">
            <text:p>{"id":"1-59","name":"ファイアソード","imageUrl":"https://one-draw.jp/ijinden/cardlist/001/card/01_059.png","expansion":15,"type":4,"color":1,"term":0,"orderTable":98,"orderDeck":273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274}," calcext:value-type="string">
            <text:p>{"id":"1-60","name":"髭切","imageUrl":"https://one-draw.jp/ijinden/cardlist/001/card/01_060.png","expansion":15,"type":4,"color":1,"term":0,"orderTable":99,"orderDeck":274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00}," calcext:value-type="string">
            <text:p>{"id":"1-61","name":"レッドオーブ","imageUrl":"https://one-draw.jp/ijinden/cardlist/001/card/01_061.png","expansion":15,"type":4,"color":1,"term":0,"orderTable":100,"orderDeck":300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277}," calcext:value-type="string">
            <text:p>{"id":"1-62","name":"ウォーターポット","imageUrl":"https://one-draw.jp/ijinden/cardlist/001/card/01_062.png","expansion":15,"type":4,"color":2,"term":0,"orderTable":101,"orderDeck":277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278}," calcext:value-type="string">
            <text:p>{"id":"1-63","name":"アイスソード","imageUrl":"https://one-draw.jp/ijinden/cardlist/001/card/01_063.png","expansion":15,"type":4,"color":2,"term":0,"orderTable":102,"orderDeck":278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279}," calcext:value-type="string">
            <text:p>{"id":"1-64","name":"羅針盤","imageUrl":"https://one-draw.jp/ijinden/cardlist/001/card/01_064.png","expansion":15,"type":4,"color":2,"term":0,"orderTable":103,"orderDeck":279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01}," calcext:value-type="string">
            <text:p>{"id":"1-65","name":"ブルーオーブ","imageUrl":"https://one-draw.jp/ijinden/cardlist/001/card/01_065.png","expansion":15,"type":4,"color":2,"term":0,"orderTable":104,"orderDeck":301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282}," calcext:value-type="string">
            <text:p>{"id":"1-66","name":"ポプリ","imageUrl":"https://one-draw.jp/ijinden/cardlist/001/card/01_066.png","expansion":15,"type":4,"color":4,"term":0,"orderTable":105,"orderDeck":282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283}," calcext:value-type="string">
            <text:p>{"id":"1-67","name":"ウッドスタッフ","imageUrl":"https://one-draw.jp/ijinden/cardlist/001/card/01_067.png","expansion":15,"type":4,"color":4,"term":0,"orderTable":106,"orderDeck":283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284}," calcext:value-type="string">
            <text:p>{"id":"1-68","name":"万葉集","imageUrl":"https://one-draw.jp/ijinden/cardlist/001/card/01_068.png","expansion":15,"type":4,"color":4,"term":0,"orderTable":107,"orderDeck":284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02}," calcext:value-type="string">
            <text:p>{"id":"1-69","name":"グリーンオーブ","imageUrl":"https://one-draw.jp/ijinden/cardlist/001/card/01_069.png","expansion":15,"type":4,"color":4,"term":0,"orderTable":108,"orderDeck":302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57}," calcext:value-type="string">
            <text:p>{"id":"1-70","name":"ビスマルク","imageUrl":"https://one-draw.jp/ijinden/cardlist/001/card/01_070.png","expansion":15,"type":1,"color":1,"term":0,"orderTable":109,"orderDeck":57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5}," calcext:value-type="string">
            <text:p>{"id":"1-72","name":"大江広元","imageUrl":"https://one-draw.jp/ijinden/cardlist/001/card/01_072.png","expansion":15,"type":1,"color":1,"term":0,"orderTable":111,"orderDeck":25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97}," calcext:value-type="string">
            <text:p>{"id":"1-73","name":"グスタフ2世アドルフ","imageUrl":"https://one-draw.jp/ijinden/cardlist/001/card/01_073.png","expansion":15,"type":1,"color":2,"term":0,"orderTable":112,"orderDeck":9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98}," calcext:value-type="string">
            <text:p>{"id":"1-74","name":"オリバー・クロムウェル","imageUrl":"https://one-draw.jp/ijinden/cardlist/001/card/01_074.png","expansion":15,"type":1,"color":2,"term":0,"orderTable":113,"orderDeck":9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99}," calcext:value-type="string">
            <text:p>{"id":"1-75","name":"衛青","imageUrl":"https://one-draw.jp/ijinden/cardlist/001/card/01_075.png","expansion":15,"type":1,"color":2,"term":0,"orderTable":114,"orderDeck":9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38}," calcext:value-type="string">
            <text:p>{"id":"1-76","name":"シーボルト","imageUrl":"https://one-draw.jp/ijinden/cardlist/001/card/01_076.png","expansion":15,"type":1,"color":4,"term":0,"orderTable":115,"orderDeck":138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0}," calcext:value-type="string">
            <text:p>{"id":"1-77","name":"乾隆帝","imageUrl":"https://one-draw.jp/ijinden/cardlist/001/card/01_077.png","expansion":15,"type":1,"color":4,"term":0,"orderTable":116,"orderDeck":40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74}," calcext:value-type="string">
            <text:p>{"id":"1-78","name":"小野好古","imageUrl":"https://one-draw.jp/ijinden/cardlist/001/card/01_078.png","expansion":15,"type":1,"color":4,"term":0,"orderTable":117,"orderDeck":74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39}," calcext:value-type="string">
            <text:p>{"id":"1-79","name":"アレッサンドロ・ヴァリニャーノ","imageUrl":"https://one-draw.jp/ijinden/cardlist/001/card/01_079.png","expansion":15,"type":1,"color":4,"term":1,"orderTable":118,"orderDeck":139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59}," calcext:value-type="string">
            <text:p>{"id":"1-80","name":"角倉了以","imageUrl":"https://one-draw.jp/ijinden/cardlist/001/card/01_080.png","expansion":15,"type":1,"color":4,"term":0,"orderTable":119,"orderDeck":159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62}," calcext:value-type="string">
            <text:p>{"id":"Y-1","name":"諸葛亮","imageUrl":"https://one-draw.jp/ijinden/cardlist/Y01/card/02_Y_001.png","expansion":20,"type":1,"color":8,"term":0,"orderTable":120,"orderDeck":162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44}," calcext:value-type="string">
            <text:p>{"id":"Y-2","name":"今川義元","imageUrl":"https://one-draw.jp/ijinden/cardlist/Y01/card/02_Y_002.png","expansion":20,"type":1,"color":8,"term":0,"orderTable":121,"orderDeck":44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09}," calcext:value-type="string">
            <text:p>{"id":"Y-3","name":"周瑜","imageUrl":"https://one-draw.jp/ijinden/cardlist/Y01/card/02_Y_003.png","expansion":20,"type":1,"color":8,"term":0,"orderTable":122,"orderDeck":109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42}," calcext:value-type="string">
            <text:p>{"id":"Y-4","name":"孫権","imageUrl":"https://one-draw.jp/ijinden/cardlist/Y01/card/02_Y_004.png","expansion":20,"type":1,"color":8,"term":0,"orderTable":123,"orderDeck":142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orderTable&quot;:124,&quot;orderDeck&quot;:174}," calcext:value-type="string">
            <text:p>{"id":"Y-5","name":"シャクシャイン","imageUrl":"https://one-draw.jp/ijinden/cardlist/Y01/card/02_Y_005.png","expansion":20,"type":1,"color":8,"term":4,"orderTable":124,"orderDeck":174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63}," calcext:value-type="string">
            <text:p>{"id":"Y-6","name":"フビライ・ハン","imageUrl":"https://one-draw.jp/ijinden/cardlist/Y01/card/02_Y_006.png","expansion":20,"type":1,"color":8,"term":0,"orderTable":125,"orderDeck":163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45}," calcext:value-type="string">
            <text:p>{"id":"Y-7","name":"足利義教","imageUrl":"https://one-draw.jp/ijinden/cardlist/Y01/card/02_Y_007.png","expansion":20,"type":1,"color":8,"term":0,"orderTable":126,"orderDeck":45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4}," calcext:value-type="string">
            <text:p>{"id":"Y-8","name":"ヴィジェ＝ルブラン","imageUrl":"https://one-draw.jp/ijinden/cardlist/Y01/card/02_Y_008.png","expansion":20,"type":1,"color":8,"term":0,"orderTable":127,"orderDeck":14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09}," calcext:value-type="string">
            <text:p>{"id":"Y-9","name":"英傑集う大河","imageUrl":"https://one-draw.jp/ijinden/cardlist/Y01/card/02_Y_009.png","expansion":20,"type":2,"color":8,"term":0,"orderTable":128,"orderDeck":209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01}," calcext:value-type="string">
            <text:p>{"id":"Y-10","name":"地上の紫微垣","imageUrl":"https://one-draw.jp/ijinden/cardlist/Y01/card/02_Y_010.png","expansion":20,"type":2,"color":8,"term":0,"orderTable":129,"orderDeck":201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240}," calcext:value-type="string">
            <text:p>{"id":"Y-11","name":"ネハン","imageUrl":"https://one-draw.jp/ijinden/cardlist/Y01/card/02_Y_011.png","expansion":20,"type":3,"color":8,"term":0,"orderTable":130,"orderDeck":24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30}," calcext:value-type="string">
            <text:p>{"id":"Y-12","name":"レクイエム","imageUrl":"https://one-draw.jp/ijinden/cardlist/Y01/card/02_Y_012.png","expansion":20,"type":3,"color":8,"term":0,"orderTable":131,"orderDeck":230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286}," calcext:value-type="string">
            <text:p>{"id":"Y-13","name":"イエローストーン","imageUrl":"https://one-draw.jp/ijinden/cardlist/Y01/card/02_Y_013.png","expansion":20,"type":4,"color":8,"term":0,"orderTable":132,"orderDeck":286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orderTable&quot;:133,&quot;orderDeck&quot;:58}," calcext:value-type="string">
            <text:p>{"id":"2-1","name":"天草四郎","imageUrl":"https://one-draw.jp/ijinden/cardlist/002/card/02_001.png","expansion":25,"type":1,"color":1,"term":4,"orderTable":133,"orderDeck":58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orderTable&quot;:134,&quot;orderDeck&quot;:131}," calcext:value-type="string">
            <text:p>{"id":"2-2","name":"ピョートル大帝","imageUrl":"https://one-draw.jp/ijinden/cardlist/002/card/02_002.png","expansion":25,"type":1,"color":2,"term":8,"orderTable":134,"orderDeck":131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190}," calcext:value-type="string">
            <text:p>{"id":"2-3","name":"エイブラハム・リンカン","imageUrl":"https://one-draw.jp/ijinden/cardlist/002/card/02_003.png","expansion":25,"type":1,"color":4,"term":0,"orderTable":135,"orderDeck":19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184}," calcext:value-type="string">
            <text:p>{"id":"2-4","name":"アイザック・ニュートン","imageUrl":"https://one-draw.jp/ijinden/cardlist/002/card/02_004.png","expansion":25,"type":1,"color":8,"term":0,"orderTable":136,"orderDeck":18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10}," calcext:value-type="string">
            <text:p>{"id":"2-5","name":"親鸞","imageUrl":"https://one-draw.jp/ijinden/cardlist/002/card/02_005.png","expansion":25,"type":1,"color":8,"term":0,"orderTable":137,"orderDeck":110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orderTable&quot;:138,&quot;orderDeck&quot;:175}," calcext:value-type="string">
            <text:p>{"id":"2-6","name":"ナポレオン・ボナパルト","imageUrl":"https://one-draw.jp/ijinden/cardlist/002/card/02_006.png","expansion":25,"type":1,"color":8,"term":8,"orderTable":138,"orderDeck":175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6}," calcext:value-type="string">
            <text:p>{"id":"2-7","name":"日野富子","imageUrl":"https://one-draw.jp/ijinden/cardlist/002/card/02_007.png","expansion":25,"type":1,"color":1,"term":0,"orderTable":139,"orderDeck":26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194}," calcext:value-type="string">
            <text:p>{"id":"2-8","name":"豊臣秀吉","imageUrl":"https://one-draw.jp/ijinden/cardlist/002/card/02_008.png","expansion":25,"type":1,"color":1,"term":0,"orderTable":140,"orderDeck":19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orderTable&quot;:141,&quot;orderDeck&quot;:123}," calcext:value-type="string">
            <text:p>{"id":"2-9","name":"石田三成","imageUrl":"https://one-draw.jp/ijinden/cardlist/002/card/02_009.png","expansion":25,"type":1,"color":1,"term":4,"orderTable":141,"orderDeck":123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59}," calcext:value-type="string">
            <text:p>{"id":"2-11","name":"道元","imageUrl":"https://one-draw.jp/ijinden/cardlist/002/card/02_011.png","expansion":25,"type":1,"color":1,"term":0,"orderTable":143,"orderDeck":59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189}," calcext:value-type="string">
            <text:p>{"id":"2-12","name":"足利義昭","imageUrl":"https://one-draw.jp/ijinden/cardlist/002/card/02_012.png","expansion":25,"type":1,"color":1,"term":0,"orderTable":144,"orderDeck":18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50}," calcext:value-type="string">
            <text:p>{"id":"2-13","name":"毛利輝元","imageUrl":"https://one-draw.jp/ijinden/cardlist/002/card/02_013.png","expansion":25,"type":1,"color":1,"term":0,"orderTable":145,"orderDeck":150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24}," calcext:value-type="string">
            <text:p>{"id":"2-14","name":"北条時政","imageUrl":"https://one-draw.jp/ijinden/cardlist/002/card/02_014.png","expansion":25,"type":1,"color":1,"term":0,"orderTable":146,"orderDeck":124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167}," calcext:value-type="string">
            <text:p>{"id":"2-15","name":"北条時宗","imageUrl":"https://one-draw.jp/ijinden/cardlist/002/card/02_015.png","expansion":25,"type":1,"color":1,"term":0,"orderTable":147,"orderDeck":167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3}," calcext:value-type="string">
            <text:p>{"id":"2-16","name":"シャルル・ド・モンテスキュー","imageUrl":"https://one-draw.jp/ijinden/cardlist/002/card/02_016.png","expansion":25,"type":1,"color":2,"term":0,"orderTable":148,"orderDeck":33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68}," calcext:value-type="string">
            <text:p>{"id":"2-17","name":"ジャン＝ジャック・ルソー","imageUrl":"https://one-draw.jp/ijinden/cardlist/002/card/02_017.png","expansion":25,"type":1,"color":2,"term":0,"orderTable":149,"orderDeck":68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4}," calcext:value-type="string">
            <text:p>{"id":"2-18","name":"エカチェリーナ2世","imageUrl":"https://one-draw.jp/ijinden/cardlist/002/card/02_018.png","expansion":25,"type":1,"color":2,"term":0,"orderTable":150,"orderDeck":34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orderTable&quot;:152,&quot;orderDeck&quot;:35}," calcext:value-type="string">
            <text:p>{"id":"2-20","name":"洪秀全","imageUrl":"https://one-draw.jp/ijinden/cardlist/002/card/02_020.png","expansion":25,"type":1,"color":2,"term":8,"orderTable":152,"orderDeck":35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69}," calcext:value-type="string">
            <text:p>{"id":"2-21","name":"ジェームズ＝ワット","imageUrl":"https://one-draw.jp/ijinden/cardlist/002/card/02_021.png","expansion":25,"type":1,"color":2,"term":0,"orderTable":153,"orderDeck":69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00}," calcext:value-type="string">
            <text:p>{"id":"2-22","name":"日蓮","imageUrl":"https://one-draw.jp/ijinden/cardlist/002/card/02_022.png","expansion":25,"type":1,"color":2,"term":1,"orderTable":154,"orderDeck":10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168}," calcext:value-type="string">
            <text:p>{"id":"2-23","name":"李舜臣","imageUrl":"https://one-draw.jp/ijinden/cardlist/002/card/02_023.png","expansion":25,"type":1,"color":2,"term":0,"orderTable":155,"orderDeck":168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32}," calcext:value-type="string">
            <text:p>{"id":"2-24","name":"山田長政","imageUrl":"https://one-draw.jp/ijinden/cardlist/002/card/02_024.png","expansion":25,"type":1,"color":2,"term":1,"orderTable":156,"orderDeck":132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60}," calcext:value-type="string">
            <text:p>{"id":"2-25","name":"運慶","imageUrl":"https://one-draw.jp/ijinden/cardlist/002/card/02_025.png","expansion":25,"type":1,"color":4,"term":0,"orderTable":157,"orderDeck":160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1}," calcext:value-type="string">
            <text:p>{"id":"2-26","name":"ハリエット・ビーチャー・ストウ","imageUrl":"https://one-draw.jp/ijinden/cardlist/002/card/02_026.png","expansion":25,"type":1,"color":4,"term":2,"orderTable":158,"orderDeck":41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orderTable&quot;:159,&quot;orderDeck&quot;:75}," calcext:value-type="string">
            <text:p>{"id":"2-27","name":"コシャマイン","imageUrl":"https://one-draw.jp/ijinden/cardlist/002/card/02_027.png","expansion":25,"type":1,"color":4,"term":4,"orderTable":159,"orderDeck":75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172}," calcext:value-type="string">
            <text:p>{"id":"2-28","name":"狩野山楽","imageUrl":"https://one-draw.jp/ijinden/cardlist/002/card/02_028.png","expansion":25,"type":1,"color":4,"term":0,"orderTable":160,"orderDeck":172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07}," calcext:value-type="string">
            <text:p>{"id":"2-29","name":"徳川家光","imageUrl":"https://one-draw.jp/ijinden/cardlist/002/card/02_029.png","expansion":25,"type":1,"color":4,"term":0,"orderTable":161,"orderDeck":107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40}," calcext:value-type="string">
            <text:p>{"id":"2-30","name":"徳川綱吉","imageUrl":"https://one-draw.jp/ijinden/cardlist/002/card/02_030.png","expansion":25,"type":1,"color":4,"term":0,"orderTable":162,"orderDeck":140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183}," calcext:value-type="string">
            <text:p>{"id":"2-31","name":"東洲斎写楽","imageUrl":"https://one-draw.jp/ijinden/cardlist/002/card/02_031.png","expansion":25,"type":1,"color":4,"term":0,"orderTable":163,"orderDeck":18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orderTable&quot;:164,&quot;orderDeck&quot;:111}," calcext:value-type="string">
            <text:p>{"id":"2-32","name":"曹操","imageUrl":"https://one-draw.jp/ijinden/cardlist/002/card/02_032.png","expansion":25,"type":1,"color":8,"term":8,"orderTable":164,"orderDeck":111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46}," calcext:value-type="string">
            <text:p>{"id":"2-33","name":"張角","imageUrl":"https://one-draw.jp/ijinden/cardlist/002/card/02_033.png","expansion":25,"type":1,"color":8,"term":0,"orderTable":165,"orderDeck":46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78}," calcext:value-type="string">
            <text:p>{"id":"2-34","name":"劉備","imageUrl":"https://one-draw.jp/ijinden/cardlist/002/card/02_034.png","expansion":25,"type":1,"color":8,"term":0,"orderTable":166,"orderDeck":78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43}," calcext:value-type="string">
            <text:p>{"id":"2-35","name":"司馬懿","imageUrl":"https://one-draw.jp/ijinden/cardlist/002/card/02_035.png","expansion":25,"type":1,"color":8,"term":0,"orderTable":167,"orderDeck":143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176}," calcext:value-type="string">
            <text:p>{"id":"2-36","name":"足利義政","imageUrl":"https://one-draw.jp/ijinden/cardlist/002/card/02_036.png","expansion":25,"type":1,"color":8,"term":0,"orderTable":168,"orderDeck":176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192}," calcext:value-type="string">
            <text:p>{"id":"2-37","name":"姜維","imageUrl":"https://one-draw.jp/ijinden/cardlist/002/card/02_037.png","expansion":25,"type":1,"color":8,"term":0,"orderTable":169,"orderDeck":19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185}," calcext:value-type="string">
            <text:p>{"id":"2-38","name":"裴松之","imageUrl":"https://one-draw.jp/ijinden/cardlist/002/card/02_038.png","expansion":25,"type":1,"color":8,"term":2,"orderTable":170,"orderDeck":18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5}," calcext:value-type="string">
            <text:p>{"id":"2-39","name":"陳寿","imageUrl":"https://one-draw.jp/ijinden/cardlist/002/card/02_039.png","expansion":25,"type":1,"color":8,"term":2,"orderTable":171,"orderDeck":15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6}," calcext:value-type="string">
            <text:p>{"id":"2-40","name":"足利尊氏","imageUrl":"https://one-draw.jp/ijinden/cardlist/002/card/02_040.png","expansion":25,"type":1,"color":8,"term":0,"orderTable":172,"orderDeck":16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7}," calcext:value-type="string">
            <text:p>{"id":"2-41","name":"カール・マルクス","imageUrl":"https://one-draw.jp/ijinden/cardlist/002/card/02_041.png","expansion":25,"type":1,"color":8,"term":0,"orderTable":173,"orderDeck":17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79}," calcext:value-type="string">
            <text:p>{"id":"2-42","name":"足利義満","imageUrl":"https://one-draw.jp/ijinden/cardlist/002/card/02_042.png","expansion":25,"type":1,"color":8,"term":0,"orderTable":174,"orderDeck":79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80}," calcext:value-type="string">
            <text:p>{"id":"2-43","name":"観阿弥","imageUrl":"https://one-draw.jp/ijinden/cardlist/002/card/02_043.png","expansion":25,"type":1,"color":8,"term":0,"orderTable":175,"orderDeck":80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12}," calcext:value-type="string">
            <text:p>{"id":"2-44","name":"世阿弥","imageUrl":"https://one-draw.jp/ijinden/cardlist/002/card/02_044.png","expansion":25,"type":1,"color":8,"term":0,"orderTable":176,"orderDeck":112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47}," calcext:value-type="string">
            <text:p>{"id":"2-45","name":"新井白石","imageUrl":"https://one-draw.jp/ijinden/cardlist/002/card/02_045.png","expansion":25,"type":1,"color":8,"term":0,"orderTable":177,"orderDeck":47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13}," calcext:value-type="string">
            <text:p>{"id":"2-46","name":"孫夫人","imageUrl":"https://one-draw.jp/ijinden/cardlist/002/card/02_046.png","expansion":25,"type":1,"color":8,"term":0,"orderTable":178,"orderDeck":113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81}," calcext:value-type="string">
            <text:p>{"id":"2-47","name":"法然","imageUrl":"https://one-draw.jp/ijinden/cardlist/002/card/02_047.png","expansion":25,"type":1,"color":8,"term":0,"orderTable":179,"orderDeck":81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44}," calcext:value-type="string">
            <text:p>{"id":"2-48","name":"一遍","imageUrl":"https://one-draw.jp/ijinden/cardlist/002/card/02_048.png","expansion":25,"type":1,"color":8,"term":0,"orderTable":180,"orderDeck":144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orderTable&quot;:181,&quot;orderDeck&quot;:197}," calcext:value-type="string">
            <text:p>{"id":"2-49","name":"籠城戦","imageUrl":"https://one-draw.jp/ijinden/cardlist/002/card/02_049.png","expansion":25,"type":2,"color":1,"term":4,"orderTable":181,"orderDeck":197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18}," calcext:value-type="string">
            <text:p>{"id":"2-50","name":"安宅船","imageUrl":"https://one-draw.jp/ijinden/cardlist/002/card/02_050.png","expansion":25,"type":2,"color":1,"term":0,"orderTable":182,"orderDeck":218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14}," calcext:value-type="string">
            <text:p>{"id":"2-51","name":"リヴァイアサン","imageUrl":"https://one-draw.jp/ijinden/cardlist/002/card/02_051.png","expansion":25,"type":2,"color":2,"term":0,"orderTable":183,"orderDeck":214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24}," calcext:value-type="string">
            <text:p>{"id":"2-52","name":"ガレオン船","imageUrl":"https://one-draw.jp/ijinden/cardlist/002/card/02_052.png","expansion":25,"type":2,"color":2,"term":0,"orderTable":184,"orderDeck":22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00}," calcext:value-type="string">
            <text:p>{"id":"2-53","name":"仁王","imageUrl":"https://one-draw.jp/ijinden/cardlist/002/card/02_053.png","expansion":25,"type":2,"color":4,"term":0,"orderTable":185,"orderDeck":200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28}," calcext:value-type="string">
            <text:p>{"id":"2-54","name":"蒸気機関車","imageUrl":"https://one-draw.jp/ijinden/cardlist/002/card/02_054.png","expansion":25,"type":2,"color":4,"term":0,"orderTable":186,"orderDeck":228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02}," calcext:value-type="string">
            <text:p>{"id":"2-55","name":"凱旋門","imageUrl":"https://one-draw.jp/ijinden/cardlist/002/card/02_055.png","expansion":25,"type":2,"color":8,"term":0,"orderTable":187,"orderDeck":202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10}," calcext:value-type="string">
            <text:p>{"id":"2-56","name":"三層の舎利殿","imageUrl":"https://one-draw.jp/ijinden/cardlist/002/card/02_056.png","expansion":25,"type":2,"color":8,"term":0,"orderTable":188,"orderDeck":210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272,&quot;orderTable&quot;:189,&quot;orderDeck&quot;:268}," calcext:value-type="string">
            <text:p>{"id":"2-57","name":"スペクター","imageUrl":"https://one-draw.jp/ijinden/cardlist/002/card/02_057.png","expansion":25,"type":3,"color":1,"term":272,"orderTable":189,"orderDeck":268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32}," calcext:value-type="string">
            <text:p>{"id":"2-58","name":"クイック","imageUrl":"https://one-draw.jp/ijinden/cardlist/002/card/02_058.png","expansion":25,"type":3,"color":1,"term":0,"orderTable":190,"orderDeck":23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246}," calcext:value-type="string">
            <text:p>{"id":"2-59","name":"サモン","imageUrl":"https://one-draw.jp/ijinden/cardlist/002/card/02_059.png","expansion":25,"type":3,"color":1,"term":0,"orderTable":191,"orderDeck":24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35}," calcext:value-type="string">
            <text:p>{"id":"2-60","name":"フェイス","imageUrl":"https://one-draw.jp/ijinden/cardlist/002/card/02_060.png","expansion":25,"type":3,"color":2,"term":0,"orderTable":192,"orderDeck":23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36}," calcext:value-type="string">
            <text:p>{"id":"2-61","name":"リドロー","imageUrl":"https://one-draw.jp/ijinden/cardlist/002/card/02_061.png","expansion":25,"type":3,"color":2,"term":0,"orderTable":193,"orderDeck":23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257}," calcext:value-type="string">
            <text:p>{"id":"2-62","name":"テンペスト","imageUrl":"https://one-draw.jp/ijinden/cardlist/002/card/02_062.png","expansion":25,"type":3,"color":2,"term":0,"orderTable":194,"orderDeck":257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259}," calcext:value-type="string">
            <text:p>{"id":"2-63","name":"ミューテイション","imageUrl":"https://one-draw.jp/ijinden/cardlist/002/card/02_063.png","expansion":25,"type":3,"color":4,"term":0,"orderTable":195,"orderDeck":259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264}," calcext:value-type="string">
            <text:p>{"id":"2-64","name":"ライブラリー","imageUrl":"https://one-draw.jp/ijinden/cardlist/002/card/02_064.png","expansion":25,"type":3,"color":4,"term":0,"orderTable":196,"orderDeck":264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29}," calcext:value-type="string">
            <text:p>{"id":"2-65","name":"チャージ","imageUrl":"https://one-draw.jp/ijinden/cardlist/002/card/02_065.png","expansion":25,"type":3,"color":4,"term":0,"orderTable":197,"orderDeck":229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265}," calcext:value-type="string">
            <text:p>{"id":"2-66","name":"カタストロフィ","imageUrl":"https://one-draw.jp/ijinden/cardlist/002/card/02_066.png","expansion":25,"type":3,"color":8,"term":0,"orderTable":198,"orderDeck":265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250}," calcext:value-type="string">
            <text:p>{"id":"2-67","name":"エクスキューション","imageUrl":"https://one-draw.jp/ijinden/cardlist/002/card/02_067.png","expansion":25,"type":3,"color":8,"term":0,"orderTable":199,"orderDeck":250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260}," calcext:value-type="string">
            <text:p>{"id":"2-68","name":"メロウ","imageUrl":"https://one-draw.jp/ijinden/cardlist/002/card/02_068.png","expansion":25,"type":3,"color":8,"term":0,"orderTable":200,"orderDeck":260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48,&quot;orderTable&quot;:201,&quot;orderDeck&quot;:251}," calcext:value-type="string">
            <text:p>{"id":"2-69","name":"スカーレット","imageUrl":"https://one-draw.jp/ijinden/cardlist/002/card/02_069.png","expansion":25,"type":3,"color":8,"term":48,"orderTable":201,"orderDeck":251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80,&quot;orderTable&quot;:202,&quot;orderDeck&quot;:252}," calcext:value-type="string">
            <text:p>{"id":"2-70","name":"ピーコック","imageUrl":"https://one-draw.jp/ijinden/cardlist/002/card/02_070.png","expansion":25,"type":3,"color":8,"term":80,"orderTable":202,"orderDeck":252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144,&quot;orderTable&quot;:203,&quot;orderDeck&quot;:253}," calcext:value-type="string">
            <text:p>{"id":"2-71","name":"シャトルーズ","imageUrl":"https://one-draw.jp/ijinden/cardlist/002/card/02_071.png","expansion":25,"type":3,"color":8,"term":144,"orderTable":203,"orderDeck":253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287}," calcext:value-type="string">
            <text:p>{"id":"2-72","name":"サンドグラス","imageUrl":"https://one-draw.jp/ijinden/cardlist/002/card/02_072.png","expansion":25,"type":4,"color":8,"term":0,"orderTable":204,"orderDeck":287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288}," calcext:value-type="string">
            <text:p>{"id":"2-73","name":"シルククローク","imageUrl":"https://one-draw.jp/ijinden/cardlist/002/card/02_073.png","expansion":25,"type":4,"color":8,"term":0,"orderTable":205,"orderDeck":288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03}," calcext:value-type="string">
            <text:p>{"id":"2-74","name":"イエローオーブ","imageUrl":"https://one-draw.jp/ijinden/cardlist/002/card/02_074.png","expansion":25,"type":4,"color":8,"term":0,"orderTable":206,"orderDeck":303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295}," calcext:value-type="string">
            <text:p>{"id":"2-75","name":"RYマーブルストーン","imageUrl":"https://one-draw.jp/ijinden/cardlist/002/card/02_075.png","expansion":25,"type":4,"color":41,"term":0,"orderTable":207,"orderDeck":295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296}," calcext:value-type="string">
            <text:p>{"id":"2-76","name":"BYマーブルストーン","imageUrl":"https://one-draw.jp/ijinden/cardlist/002/card/02_076.png","expansion":25,"type":4,"color":42,"term":0,"orderTable":208,"orderDeck":296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297}," calcext:value-type="string">
            <text:p>{"id":"2-77","name":"GYマーブルストーン","imageUrl":"https://one-draw.jp/ijinden/cardlist/002/card/02_077.png","expansion":25,"type":4,"color":44,"term":0,"orderTable":209,"orderDeck":297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05}," calcext:value-type="string">
            <text:p>{"id":"2-78","name":"RYマーブルオーブ","imageUrl":"https://one-draw.jp/ijinden/cardlist/002/card/02_078.png","expansion":25,"type":4,"color":41,"term":0,"orderTable":210,"orderDeck":305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06}," calcext:value-type="string">
            <text:p>{"id":"2-79","name":"BYマーブルオーブ","imageUrl":"https://one-draw.jp/ijinden/cardlist/002/card/02_079.png","expansion":25,"type":4,"color":42,"term":0,"orderTable":211,"orderDeck":306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07}," calcext:value-type="string">
            <text:p>{"id":"2-80","name":"GYマーブルオーブ","imageUrl":"https://one-draw.jp/ijinden/cardlist/002/card/02_080.png","expansion":25,"type":4,"color":44,"term":0,"orderTable":212,"orderDeck":307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14}," calcext:value-type="string">
            <text:p>{"id":"P-1","name":"マリ・キュリー","imageUrl":"https://one-draw.jp/ijinden/cardlist/P01/card/03_P_001.png","expansion":30,"type":1,"color":16,"term":0,"orderTable":213,"orderDeck":114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19}," calcext:value-type="string">
            <text:p>{"id":"P-2","name":"篤姫","imageUrl":"https://one-draw.jp/ijinden/cardlist/P01/card/03_P_002.png","expansion":30,"type":1,"color":16,"term":0,"orderTable":214,"orderDeck":19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49}," calcext:value-type="string">
            <text:p>{"id":"P-3","name":"李成桂","imageUrl":"https://one-draw.jp/ijinden/cardlist/P01/card/03_P_003.png","expansion":30,"type":1,"color":16,"term":0,"orderTable":215,"orderDeck":49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15}," calcext:value-type="string">
            <text:p>{"id":"P-4","name":"杉田玄白","imageUrl":"https://one-draw.jp/ijinden/cardlist/P01/card/03_P_004.png","expansion":30,"type":1,"color":16,"term":0,"orderTable":216,"orderDeck":115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0}," calcext:value-type="string">
            <text:p>{"id":"P-5","name":"渡辺崋山","imageUrl":"https://one-draw.jp/ijinden/cardlist/P01/card/03_P_005.png","expansion":30,"type":1,"color":16,"term":0,"orderTable":217,"orderDeck":50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83}," calcext:value-type="string">
            <text:p>{"id":"P-6","name":"緒方洪庵","imageUrl":"https://one-draw.jp/ijinden/cardlist/P01/card/03_P_006.png","expansion":30,"type":1,"color":16,"term":0,"orderTable":218,"orderDeck":83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47}," calcext:value-type="string">
            <text:p>{"id":"P-7","name":"岡田以蔵","imageUrl":"https://one-draw.jp/ijinden/cardlist/P01/card/03_P_007.png","expansion":30,"type":1,"color":16,"term":0,"orderTable":219,"orderDeck":14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84}," calcext:value-type="string">
            <text:p>{"id":"P-8","name":"クララ・バートン","imageUrl":"https://one-draw.jp/ijinden/cardlist/P01/card/03_P_008.png","expansion":30,"type":1,"color":16,"term":0,"orderTable":220,"orderDeck":84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26}," calcext:value-type="string">
            <text:p>{"id":"P-9","name":"虎狼痢","imageUrl":"https://one-draw.jp/ijinden/cardlist/P01/card/03_P_009.png","expansion":30,"type":2,"color":16,"term":0,"orderTable":221,"orderDeck":226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23}," calcext:value-type="string">
            <text:p>{"id":"P-10","name":"浪士集う長屋","imageUrl":"https://one-draw.jp/ijinden/cardlist/P01/card/03_P_010.png","expansion":30,"type":2,"color":16,"term":0,"orderTable":222,"orderDeck":223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31}," calcext:value-type="string">
            <text:p>{"id":"P-11","name":"スピリットアウェイ","imageUrl":"https://one-draw.jp/ijinden/cardlist/P01/card/03_P_011.png","expansion":30,"type":3,"color":16,"term":0,"orderTable":223,"orderDeck":231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261}," calcext:value-type="string">
            <text:p>{"id":"P-12","name":"タイムディレイション","imageUrl":"https://one-draw.jp/ijinden/cardlist/P01/card/03_P_012.png","expansion":30,"type":3,"color":16,"term":0,"orderTable":224,"orderDeck":261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290}," calcext:value-type="string">
            <text:p>{"id":"P-13","name":"ハンドミラー","imageUrl":"https://one-draw.jp/ijinden/cardlist/P01/card/03_P_013.png","expansion":30,"type":4,"color":16,"term":0,"orderTable":225,"orderDeck":290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291}," calcext:value-type="string">
            <text:p>{"id":"P-14","name":"ブラックブレイド","imageUrl":"https://one-draw.jp/ijinden/cardlist/P01/card/03_P_014.png","expansion":30,"type":4,"color":16,"term":0,"orderTable":226,"orderDeck":291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04}," calcext:value-type="string">
            <text:p>{"id":"P-15","name":"パープルオーブ","imageUrl":"https://one-draw.jp/ijinden/cardlist/P01/card/03_P_015.png","expansion":30,"type":4,"color":16,"term":0,"orderTable":227,"orderDeck":304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292}," calcext:value-type="string">
            <text:p>{"id":"P-16","name":"パープルストーン","imageUrl":"https://one-draw.jp/ijinden/cardlist/P01/card/03_P_016.png","expansion":30,"type":4,"color":16,"term":0,"orderTable":228,"orderDeck":292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25}," calcext:value-type="string">
            <text:p>{"id":"3-1","name":"宮本武蔵","imageUrl":"https://one-draw.jp/ijinden/cardlist/003/card/03_001.png","expansion":35,"type":1,"color":1,"term":0,"orderTable":229,"orderDeck":125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92}," calcext:value-type="string">
            <text:p>{"id":"3-2","name":"エリザベス1世","imageUrl":"https://one-draw.jp/ijinden/cardlist/003/card/03_002.png","expansion":35,"type":1,"color":1,"term":0,"orderTable":230,"orderDeck":92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169}," calcext:value-type="string">
            <text:p>{"id":"3-3","name":"エンリケ航海王子","imageUrl":"https://one-draw.jp/ijinden/cardlist/003/card/03_003.png","expansion":35,"type":1,"color":2,"term":0,"orderTable":231,"orderDeck":169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33}," calcext:value-type="string">
            <text:p>{"id":"3-4","name":"吉田松陰","imageUrl":"https://one-draw.jp/ijinden/cardlist/003/card/03_004.png","expansion":35,"type":1,"color":2,"term":0,"orderTable":232,"orderDeck":133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41}," calcext:value-type="string">
            <text:p>{"id":"3-5","name":"徳川光圀","imageUrl":"https://one-draw.jp/ijinden/cardlist/003/card/03_005.png","expansion":35,"type":1,"color":4,"term":2,"orderTable":233,"orderDeck":141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173}," calcext:value-type="string">
            <text:p>{"id":"3-6","name":"葛飾応為","imageUrl":"https://one-draw.jp/ijinden/cardlist/003/card/03_006.png","expansion":35,"type":1,"color":4,"term":0,"orderTable":234,"orderDeck":173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45}," calcext:value-type="string">
            <text:p>{"id":"3-7","name":"曹丕","imageUrl":"https://one-draw.jp/ijinden/cardlist/003/card/03_007.png","expansion":35,"type":1,"color":8,"term":2,"orderTable":235,"orderDeck":145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186}," calcext:value-type="string">
            <text:p>{"id":"3-8","name":"ジェーン・オースティン","imageUrl":"https://one-draw.jp/ijinden/cardlist/003/card/03_008.png","expansion":35,"type":1,"color":8,"term":2,"orderTable":236,"orderDeck":18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165}," calcext:value-type="string">
            <text:p>{"id":"3-9","name":"土方歳三","imageUrl":"https://one-draw.jp/ijinden/cardlist/003/card/03_009.png","expansion":35,"type":1,"color":16,"term":0,"orderTable":237,"orderDeck":165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51}," calcext:value-type="string">
            <text:p>{"id":"3-10","name":"武則天","imageUrl":"https://one-draw.jp/ijinden/cardlist/003/card/03_010.png","expansion":35,"type":1,"color":16,"term":0,"orderTable":238,"orderDeck":51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93}," calcext:value-type="string">
            <text:p>{"id":"3-11","name":"ウィリアム・セシル","imageUrl":"https://one-draw.jp/ijinden/cardlist/003/card/03_011.png","expansion":35,"type":1,"color":1,"term":0,"orderTable":239,"orderDeck":93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60}," calcext:value-type="string">
            <text:p>{"id":"3-12","name":"イーライ・ホイットニー","imageUrl":"https://one-draw.jp/ijinden/cardlist/003/card/03_012.png","expansion":35,"type":1,"color":1,"term":0,"orderTable":240,"orderDeck":60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7}," calcext:value-type="string">
            <text:p>{"id":"3-13","name":"平賀源内","imageUrl":"https://one-draw.jp/ijinden/cardlist/003/card/03_013.png","expansion":35,"type":1,"color":1,"term":0,"orderTable":241,"orderDeck":27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61}," calcext:value-type="string">
            <text:p>{"id":"3-14","name":"ジョージ・スチーブンソン","imageUrl":"https://one-draw.jp/ijinden/cardlist/003/card/03_014.png","expansion":35,"type":1,"color":1,"term":0,"orderTable":242,"orderDeck":61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26}," calcext:value-type="string">
            <text:p>{"id":"3-15","name":"淀殿","imageUrl":"https://one-draw.jp/ijinden/cardlist/003/card/03_015.png","expansion":35,"type":1,"color":1,"term":0,"orderTable":243,"orderDeck":126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orderTable&quot;:245,&quot;orderDeck&quot;:179}," calcext:value-type="string">
            <text:p>{"id":"3-17","name":"大塩平八郎","imageUrl":"https://one-draw.jp/ijinden/cardlist/003/card/03_017.png","expansion":35,"type":1,"color":1,"term":4,"orderTable":245,"orderDeck":17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51}," calcext:value-type="string">
            <text:p>{"id":"3-18","name":"水野忠邦","imageUrl":"https://one-draw.jp/ijinden/cardlist/003/card/03_018.png","expansion":35,"type":1,"color":1,"term":0,"orderTable":246,"orderDeck":151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180}," calcext:value-type="string">
            <text:p>{"id":"3-19","name":"伊達政宗","imageUrl":"https://one-draw.jp/ijinden/cardlist/003/card/03_019.png","expansion":35,"type":1,"color":2,"term":0,"orderTable":247,"orderDeck":18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55}," calcext:value-type="string">
            <text:p>{"id":"3-20","name":"バルトロメウ=ディアス","imageUrl":"https://one-draw.jp/ijinden/cardlist/003/card/03_020.png","expansion":35,"type":1,"color":2,"term":1,"orderTable":248,"orderDeck":155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orderTable&quot;:250,&quot;orderDeck&quot;:36}," calcext:value-type="string">
            <text:p>{"id":"3-22","name":"高杉晋作","imageUrl":"https://one-draw.jp/ijinden/cardlist/003/card/03_022.png","expansion":35,"type":1,"color":2,"term":8,"orderTable":250,"orderDeck":36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01}," calcext:value-type="string">
            <text:p>{"id":"3-23","name":"トマス・ニューコメン","imageUrl":"https://one-draw.jp/ijinden/cardlist/003/card/03_023.png","expansion":35,"type":1,"color":2,"term":0,"orderTable":251,"orderDeck":10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34}," calcext:value-type="string">
            <text:p>{"id":"3-24","name":"アダム・ラクスマン","imageUrl":"https://one-draw.jp/ijinden/cardlist/003/card/03_024.png","expansion":35,"type":1,"color":2,"term":0,"orderTable":252,"orderDeck":134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37}," calcext:value-type="string">
            <text:p>{"id":"3-25","name":"大黒屋光太夫","imageUrl":"https://one-draw.jp/ijinden/cardlist/003/card/03_025.png","expansion":35,"type":1,"color":2,"term":1,"orderTable":253,"orderDeck":37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76}," calcext:value-type="string">
            <text:p>{"id":"3-27","name":"小野小町","imageUrl":"https://one-draw.jp/ijinden/cardlist/003/card/03_027.png","expansion":35,"type":1,"color":4,"term":2,"orderTable":255,"orderDeck":76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77}," calcext:value-type="string">
            <text:p>{"id":"3-28","name":"松尾芭蕉","imageUrl":"https://one-draw.jp/ijinden/cardlist/003/card/03_028.png","expansion":35,"type":1,"color":4,"term":2,"orderTable":256,"orderDeck":77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08}," calcext:value-type="string">
            <text:p>{"id":"3-29","name":"朱舜水","imageUrl":"https://one-draw.jp/ijinden/cardlist/003/card/03_029.png","expansion":35,"type":1,"color":4,"term":0,"orderTable":257,"orderDeck":108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2}," calcext:value-type="string">
            <text:p>{"id":"3-30","name":"井原西鶴","imageUrl":"https://one-draw.jp/ijinden/cardlist/003/card/03_030.png","expansion":35,"type":1,"color":4,"term":2,"orderTable":258,"orderDeck":42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191}," calcext:value-type="string">
            <text:p>{"id":"3-31","name":"近松門左衛門","imageUrl":"https://one-draw.jp/ijinden/cardlist/003/card/03_031.png","expansion":35,"type":1,"color":4,"term":2,"orderTable":259,"orderDeck":19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3}," calcext:value-type="string">
            <text:p>{"id":"3-32","name":"田沼意次","imageUrl":"https://one-draw.jp/ijinden/cardlist/003/card/03_032.png","expansion":35,"type":1,"color":4,"term":0,"orderTable":260,"orderDeck":13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3}," calcext:value-type="string">
            <text:p>{"id":"3-33","name":"高野長英","imageUrl":"https://one-draw.jp/ijinden/cardlist/003/card/03_033.png","expansion":35,"type":1,"color":4,"term":0,"orderTable":261,"orderDeck":43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61}," calcext:value-type="string">
            <text:p>{"id":"3-34","name":"菱川師宣","imageUrl":"https://one-draw.jp/ijinden/cardlist/003/card/03_034.png","expansion":35,"type":1,"color":4,"term":0,"orderTable":262,"orderDeck":161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46}," calcext:value-type="string">
            <text:p>{"id":"3-35","name":"徳川吉宗","imageUrl":"https://one-draw.jp/ijinden/cardlist/003/card/03_035.png","expansion":35,"type":1,"color":8,"term":0,"orderTable":263,"orderDeck":146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8}," calcext:value-type="string">
            <text:p>{"id":"3-36","name":"雪舟","imageUrl":"https://one-draw.jp/ijinden/cardlist/003/card/03_036.png","expansion":35,"type":1,"color":8,"term":0,"orderTable":264,"orderDeck":18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64}," calcext:value-type="string">
            <text:p>{"id":"3-37","name":"俵屋宗達","imageUrl":"https://one-draw.jp/ijinden/cardlist/003/card/03_037.png","expansion":35,"type":1,"color":8,"term":0,"orderTable":265,"orderDeck":164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193}," calcext:value-type="string">
            <text:p>{"id":"3-38","name":"司馬炎","imageUrl":"https://one-draw.jp/ijinden/cardlist/003/card/03_038.png","expansion":35,"type":1,"color":8,"term":0,"orderTable":266,"orderDeck":19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187}," calcext:value-type="string">
            <text:p>{"id":"3-39","name":"井伊直弼","imageUrl":"https://one-draw.jp/ijinden/cardlist/003/card/03_039.png","expansion":35,"type":1,"color":8,"term":0,"orderTable":267,"orderDeck":18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82}," calcext:value-type="string">
            <text:p>{"id":"3-40","name":"徳川家茂","imageUrl":"https://one-draw.jp/ijinden/cardlist/003/card/03_040.png","expansion":35,"type":1,"color":8,"term":0,"orderTable":268,"orderDeck":82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177}," calcext:value-type="string">
            <text:p>{"id":"3-41","name":"松平定信","imageUrl":"https://one-draw.jp/ijinden/cardlist/003/card/03_041.png","expansion":35,"type":1,"color":8,"term":0,"orderTable":269,"orderDeck":177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48}," calcext:value-type="string">
            <text:p>{"id":"3-42","name":"ルイス・キャロル","imageUrl":"https://one-draw.jp/ijinden/cardlist/003/card/03_042.png","expansion":35,"type":1,"color":8,"term":2,"orderTable":270,"orderDeck":48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0}," calcext:value-type="string">
            <text:p>{"id":"3-43","name":"芹沢鴨","imageUrl":"https://one-draw.jp/ijinden/cardlist/003/card/03_043.png","expansion":35,"type":1,"color":16,"term":0,"orderTable":271,"orderDeck":20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16}," calcext:value-type="string">
            <text:p>{"id":"3-44","name":"本居宣長","imageUrl":"https://one-draw.jp/ijinden/cardlist/003/card/03_044.png","expansion":35,"type":1,"color":16,"term":0,"orderTable":272,"orderDeck":116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85}," calcext:value-type="string">
            <text:p>{"id":"3-45","name":"坂本龍馬","imageUrl":"https://one-draw.jp/ijinden/cardlist/003/card/03_045.png","expansion":35,"type":1,"color":16,"term":0,"orderTable":273,"orderDeck":85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178}," calcext:value-type="string">
            <text:p>{"id":"3-46","name":"近藤勇","imageUrl":"https://one-draw.jp/ijinden/cardlist/003/card/03_046.png","expansion":35,"type":1,"color":16,"term":0,"orderTable":274,"orderDeck":17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1}," calcext:value-type="string">
            <text:p>{"id":"3-47","name":"徳川慶喜","imageUrl":"https://one-draw.jp/ijinden/cardlist/003/card/03_047.png","expansion":35,"type":1,"color":16,"term":0,"orderTable":275,"orderDeck":21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17}," calcext:value-type="string">
            <text:p>{"id":"3-48","name":"マシュー・カルブレイス・ペリー","imageUrl":"https://one-draw.jp/ijinden/cardlist/003/card/03_048.png","expansion":35,"type":1,"color":16,"term":1,"orderTable":276,"orderDeck":117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188}," calcext:value-type="string">
            <text:p>{"id":"3-49","name":"タウンゼント・ハリス","imageUrl":"https://one-draw.jp/ijinden/cardlist/003/card/03_049.png","expansion":35,"type":1,"color":16,"term":1,"orderTable":277,"orderDeck":18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86}," calcext:value-type="string">
            <text:p>{"id":"3-50","name":"勝海舟","imageUrl":"https://one-draw.jp/ijinden/cardlist/003/card/03_050.png","expansion":35,"type":1,"color":16,"term":0,"orderTable":278,"orderDeck":86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05}," calcext:value-type="string">
            <text:p>{"id":"3-51","name":"炎上がる天守閣","imageUrl":"https://one-draw.jp/ijinden/cardlist/003/card/03_051.png","expansion":35,"type":2,"color":1,"term":0,"orderTable":279,"orderDeck":205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195}," calcext:value-type="string">
            <text:p>{"id":"3-52","name":"天下分け目の主戦場","imageUrl":"https://one-draw.jp/ijinden/cardlist/003/card/03_052.png","expansion":35,"type":2,"color":1,"term":0,"orderTable":280,"orderDeck":195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15}," calcext:value-type="string">
            <text:p>{"id":"3-53","name":"永遠の帝都","imageUrl":"https://one-draw.jp/ijinden/cardlist/003/card/03_053.png","expansion":35,"type":2,"color":2,"term":0,"orderTable":281,"orderDeck":215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20}," calcext:value-type="string">
            <text:p>{"id":"3-54","name":"暴風岬","imageUrl":"https://one-draw.jp/ijinden/cardlist/003/card/03_054.png","expansion":35,"type":2,"color":2,"term":0,"orderTable":282,"orderDeck":220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08}," calcext:value-type="string">
            <text:p>{"id":"3-55","name":"商館並ぶ人工島","imageUrl":"https://one-draw.jp/ijinden/cardlist/003/card/03_055.png","expansion":35,"type":2,"color":4,"term":0,"orderTable":283,"orderDeck":208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22}," calcext:value-type="string">
            <text:p>{"id":"3-56","name":"志士の藩校","imageUrl":"https://one-draw.jp/ijinden/cardlist/003/card/03_056.png","expansion":35,"type":2,"color":4,"term":0,"orderTable":284,"orderDeck":222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17}," calcext:value-type="string">
            <text:p>{"id":"3-57","name":"風神雷神図","imageUrl":"https://one-draw.jp/ijinden/cardlist/003/card/03_057.png","expansion":35,"type":2,"color":8,"term":0,"orderTable":285,"orderDeck":217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11}," calcext:value-type="string">
            <text:p>{"id":"3-58","name":"茅葺き屋根の張出し舞台","imageUrl":"https://one-draw.jp/ijinden/cardlist/003/card/03_058.png","expansion":35,"type":2,"color":8,"term":0,"orderTable":286,"orderDeck":211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03}," calcext:value-type="string">
            <text:p>{"id":"3-59","name":"森閑たる離宮","imageUrl":"https://one-draw.jp/ijinden/cardlist/003/card/03_059.png","expansion":35,"type":2,"color":16,"term":0,"orderTable":287,"orderDeck":203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27}," calcext:value-type="string">
            <text:p>{"id":"3-60","name":"黒船","imageUrl":"https://one-draw.jp/ijinden/cardlist/003/card/03_060.png","expansion":35,"type":2,"color":16,"term":0,"orderTable":288,"orderDeck":227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267}," calcext:value-type="string">
            <text:p>{"id":"3-61","name":"サンダーボルト","imageUrl":"https://one-draw.jp/ijinden/cardlist/003/card/03_061.png","expansion":35,"type":3,"color":1,"term":0,"orderTable":289,"orderDeck":267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33}," calcext:value-type="string">
            <text:p>{"id":"3-62","name":"パイロオーラ","imageUrl":"https://one-draw.jp/ijinden/cardlist/003/card/03_062.png","expansion":35,"type":3,"color":1,"term":0,"orderTable":290,"orderDeck":23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269}," calcext:value-type="string">
            <text:p>{"id":"3-63","name":"アイオン","imageUrl":"https://one-draw.jp/ijinden/cardlist/003/card/03_063.png","expansion":35,"type":3,"color":2,"term":0,"orderTable":291,"orderDeck":269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37}," calcext:value-type="string">
            <text:p>{"id":"3-64","name":"ハイドロオーラ","imageUrl":"https://one-draw.jp/ijinden/cardlist/003/card/03_064.png","expansion":35,"type":3,"color":2,"term":0,"orderTable":292,"orderDeck":23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262}," calcext:value-type="string">
            <text:p>{"id":"3-65","name":"ソーサリー","imageUrl":"https://one-draw.jp/ijinden/cardlist/003/card/03_065.png","expansion":35,"type":3,"color":4,"term":0,"orderTable":293,"orderDeck":262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38}," calcext:value-type="string">
            <text:p>{"id":"3-66","name":"クロロオーラ","imageUrl":"https://one-draw.jp/ijinden/cardlist/003/card/03_066.png","expansion":35,"type":3,"color":4,"term":0,"orderTable":294,"orderDeck":23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39}," calcext:value-type="string">
            <text:p>{"id":"3-67","name":"パシフィック","imageUrl":"https://one-draw.jp/ijinden/cardlist/003/card/03_067.png","expansion":35,"type":3,"color":8,"term":0,"orderTable":295,"orderDeck":23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241}," calcext:value-type="string">
            <text:p>{"id":"3-68","name":"ジオオーラ","imageUrl":"https://one-draw.jp/ijinden/cardlist/003/card/03_068.png","expansion":35,"type":3,"color":8,"term":0,"orderTable":296,"orderDeck":24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254}," calcext:value-type="string">
            <text:p>{"id":"3-69","name":"コーザリティ","imageUrl":"https://one-draw.jp/ijinden/cardlist/003/card/03_069.png","expansion":35,"type":3,"color":16,"term":0,"orderTable":297,"orderDeck":254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242}," calcext:value-type="string">
            <text:p>{"id":"3-70","name":"エアロオーラ","imageUrl":"https://one-draw.jp/ijinden/cardlist/003/card/03_070.png","expansion":35,"type":3,"color":16,"term":0,"orderTable":298,"orderDeck":24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275}," calcext:value-type="string">
            <text:p>{"id":"3-71","name":"喜びの種","imageUrl":"https://one-draw.jp/ijinden/cardlist/003/card/03_071.png","expansion":35,"type":4,"color":1,"term":0,"orderTable":299,"orderDeck":275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280}," calcext:value-type="string">
            <text:p>{"id":"3-72","name":"怖れの種","imageUrl":"https://one-draw.jp/ijinden/cardlist/003/card/03_072.png","expansion":35,"type":4,"color":2,"term":0,"orderTable":300,"orderDeck":280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285}," calcext:value-type="string">
            <text:p>{"id":"3-73","name":"怒りの種","imageUrl":"https://one-draw.jp/ijinden/cardlist/003/card/03_073.png","expansion":35,"type":4,"color":4,"term":0,"orderTable":301,"orderDeck":285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289}," calcext:value-type="string">
            <text:p>{"id":"3-74","name":"苦しみの種","imageUrl":"https://one-draw.jp/ijinden/cardlist/003/card/03_074.png","expansion":35,"type":4,"color":8,"term":0,"orderTable":302,"orderDeck":289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293}," calcext:value-type="string">
            <text:p>{"id":"3-75","name":"悲しみの種","imageUrl":"https://one-draw.jp/ijinden/cardlist/003/card/03_075.png","expansion":35,"type":4,"color":16,"term":0,"orderTable":303,"orderDeck":293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294}," calcext:value-type="string">
            <text:p>{"id":"3-76","name":"ダンダラ羽織","imageUrl":"https://one-draw.jp/ijinden/cardlist/003/card/03_076.png","expansion":35,"type":4,"color":16,"term":0,"orderTable":304,"orderDeck":294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270}," calcext:value-type="string">
            <text:p>{"id":"3-77","name":"遁甲盤","imageUrl":"https://one-draw.jp/ijinden/cardlist/003/card/03_077.png","expansion":35,"type":4,"color":64,"term":0,"orderTable":305,"orderDeck":270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298}," calcext:value-type="string">
            <text:p>{"id":"3-78","name":"ホムンクルス","imageUrl":"https://one-draw.jp/ijinden/cardlist/003/card/03_078.png","expansion":35,"type":4,"color":64,"term":0,"orderTable":306,"orderDeck":298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299}," calcext:value-type="string">
            <text:p>{"id":"3-79","name":"ストーンマスク","imageUrl":"https://one-draw.jp/ijinden/cardlist/003/card/03_079.png","expansion":35,"type":4,"color":64,"term":0,"orderTable":307,"orderDeck":29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08}," calcext:value-type="string">
            <text:p>{"id":"3-80","name":"オブシディアン","imageUrl":"https://one-draw.jp/ijinden/cardlist/003/card/03_080.png","expansion":35,"type":4,"color":64,"term":0,"orderTable":308,"orderDeck":308},</text:p>
          </table:table-cell>
          <table:table-cell table:number-columns-repeated="16347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1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Q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00/00/00</text:date>, <text:time style:data-style-name="N2" text:time-value="13:30:14.77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2-24T13:33:13.544000000</dc:date>
    <meta:editing-duration>PT7H45M27S</meta:editing-duration>
    <meta:editing-cycles>271</meta:editing-cycles>
    <meta:generator>LibreOffice/7.5.3.2$Windows_X86_64 LibreOffice_project/9f56dff12ba03b9acd7730a5a481eea045e468f3</meta:generator>
    <meta:document-statistic meta:table-count="6" meta:cell-count="5327" meta:object-count="0"/>
  </office:meta>
</office:document-meta>
</file>