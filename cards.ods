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游ゴシック" svg:font-family="游ゴシック" style:font-family-generic="system" style:font-pitch="variable"/>
  </office:font-face-decls>
  <office:automatic-styles>
    <style:style style:name="co6" style:family="table-column">
      <style:table-column-properties fo:break-before="auto" style:column-width="4.232cm"/>
    </style:style>
    <style:style style:name="co3" style:family="table-column">
      <style:table-column-properties fo:break-before="auto" style:column-width="0.665cm"/>
    </style:style>
    <style:style style:name="co10" style:family="table-column">
      <style:table-column-properties fo:break-before="auto" style:column-width="1.005cm"/>
    </style:style>
    <style:style style:name="co16" style:family="table-column">
      <style:table-column-properties fo:break-before="auto" style:column-width="0.474cm"/>
    </style:style>
    <style:style style:name="co9" style:family="table-column">
      <style:table-column-properties fo:break-before="auto" style:column-width="1.727cm"/>
    </style:style>
    <style:style style:name="co11" style:family="table-column">
      <style:table-column-properties fo:break-before="auto" style:column-width="1.365cm"/>
    </style:style>
    <style:style style:name="co1" style:family="table-column">
      <style:table-column-properties fo:break-before="auto" style:column-width="0.857cm"/>
    </style:style>
    <style:style style:name="co12" style:family="table-column">
      <style:table-column-properties fo:break-before="auto" style:column-width="1.917cm"/>
    </style:style>
    <style:style style:name="co17" style:family="table-column">
      <style:table-column-properties fo:break-before="auto" style:column-width="3.531cm"/>
    </style:style>
    <style:style style:name="co18" style:family="table-column">
      <style:table-column-properties fo:break-before="auto" style:column-width="1.175cm"/>
    </style:style>
    <style:style style:name="co19" style:family="table-column">
      <style:table-column-properties fo:break-before="auto" style:column-width="1.875cm"/>
    </style:style>
    <style:style style:name="co20" style:family="table-column">
      <style:table-column-properties fo:break-before="auto" style:column-width="1.769cm"/>
    </style:style>
    <style:style style:name="co21" style:family="table-column">
      <style:table-column-properties fo:break-before="auto" style:column-width="2.173cm"/>
    </style:style>
    <style:style style:name="co22" style:family="table-column">
      <style:table-column-properties fo:break-before="auto" style:column-width="2.152cm"/>
    </style:style>
    <style:style style:name="co23" style:family="table-column">
      <style:table-column-properties fo:break-before="auto" style:column-width="2.596cm"/>
    </style:style>
    <style:style style:name="co24" style:family="table-column">
      <style:table-column-properties fo:break-before="auto" style:column-width="2.3cm"/>
    </style:style>
    <style:style style:name="co25" style:family="table-column">
      <style:table-column-properties fo:break-before="auto" style:column-width="2.491cm"/>
    </style:style>
    <style:style style:name="co26" style:family="table-column">
      <style:table-column-properties fo:break-before="auto" style:column-width="1.579cm"/>
    </style:style>
    <style:style style:name="co27" style:family="table-column">
      <style:table-column-properties fo:break-before="auto" style:column-width="1.429cm"/>
    </style:style>
    <style:style style:name="co28" style:family="table-column">
      <style:table-column-properties fo:break-before="auto" style:column-width="1.494cm"/>
    </style:style>
    <style:style style:name="co29" style:family="table-column">
      <style:table-column-properties fo:break-before="auto" style:column-width="1.536cm"/>
    </style:style>
    <style:style style:name="co30" style:family="table-column">
      <style:table-column-properties fo:break-before="auto" style:column-width="1.471cm"/>
    </style:style>
    <style:style style:name="co31" style:family="table-column">
      <style:table-column-properties fo:break-before="auto" style:column-width="1.79cm"/>
    </style:style>
    <style:style style:name="co32" style:family="table-column">
      <style:table-column-properties fo:break-before="auto" style:column-width="2.427cm"/>
    </style:style>
    <style:style style:name="co33" style:family="table-column">
      <style:table-column-properties fo:break-before="auto" style:column-width="2.406cm"/>
    </style:style>
    <style:style style:name="co34" style:family="table-column">
      <style:table-column-properties fo:break-before="auto" style:column-width="0.517cm"/>
    </style:style>
    <style:style style:name="co15" style:family="table-column">
      <style:table-column-properties fo:break-before="auto" style:column-width="2.258cm"/>
    </style:style>
    <style:style style:name="co36" style:family="table-column">
      <style:table-column-properties fo:break-before="auto" style:column-width="1.069cm"/>
    </style:style>
    <style:style style:name="co37" style:family="table-column">
      <style:table-column-properties fo:break-before="auto" style:column-width="7.458cm"/>
    </style:style>
    <style:style style:name="co38" style:family="table-column">
      <style:table-column-properties fo:break-before="auto" style:column-width="6.715cm"/>
    </style:style>
    <style:style style:name="co39" style:family="table-column">
      <style:table-column-properties fo:break-before="auto" style:column-width="0.686cm"/>
    </style:style>
    <style:style style:name="co40" style:family="table-column">
      <style:table-column-properties fo:break-before="auto" style:column-width="0.771cm"/>
    </style:style>
    <style:style style:name="co41" style:family="table-column">
      <style:table-column-properties fo:break-before="auto" style:column-width="3.798cm"/>
    </style:style>
    <style:style style:name="co42" style:family="table-column">
      <style:table-column-properties fo:break-before="auto" style:column-width="9.495cm"/>
    </style:style>
    <style:style style:name="ro2" style:family="table-row">
      <style:table-row-properties style:row-height="0.452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2.54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5" style:family="table-cell" style:parent-style-name="Default">
      <style:table-cell-properties style:text-align-source="fix" style:repeat-content="false" style:rotation-angle="90" style:vertical-align="bottom"/>
      <style:paragraph-properties fo:text-align="end" fo:margin-left="0cm"/>
    </style:style>
    <style:style style:name="ce16" style:family="table-cell" style:parent-style-name="Default" style:data-style-name="N100">
      <style:table-cell-properties style:text-align-source="value-type" style:repeat-content="false" style:vertical-align="bottom"/>
      <style:paragraph-properties fo:margin-left="0cm"/>
    </style:style>
    <style:style style:name="ce6" style:family="table-cell" style:parent-style-name="Default" style:data-style-name="N100"/>
    <style:style style:name="ce18" style:family="table-cell" style:parent-style-name="Default" style:data-style-name="N0">
      <style:table-cell-properties style:text-align-source="fix" style:repeat-content="false" style:rotation-angle="90" style:vertical-align="bottom"/>
      <style:paragraph-properties fo:text-align="end" fo:margin-left="0cm"/>
    </style:style>
    <style:style style:name="ce19" style:family="table-cell" style:parent-style-name="Default" style:data-style-name="N0"/>
    <style:style style:name="ce20" style:family="table-cell" style:parent-style-name="Default">
      <style:table-cell-properties style:text-align-source="value-type" style:repeat-content="false" style:vertical-align="bottom"/>
      <style:paragraph-properties fo:margin-left="0cm"/>
    </style:style>
    <style:style style:name="ce10" style:family="table-cell" style:parent-style-name="Default">
      <style:table-cell-properties style:text-align-source="fix" style:repeat-content="false" fo:background-color="transparent" style:rotation-angle="90" style:vertical-align="bottom"/>
      <style:paragraph-properties fo:text-align="end" fo:margin-left="0cm"/>
    </style:style>
    <style:style style:name="ce11" style:family="table-cell" style:parent-style-name="Default">
      <style:table-cell-properties fo:background-color="transparent"/>
    </style:style>
    <style:style style:name="ce14" style:family="table-cell" style:parent-style-name="Default">
      <style:table-cell-properties style:text-align-source="value-type" style:repeat-content="false" style:rotation-angle="0" style:vertical-align="bottom"/>
      <style:paragraph-properties fo:margin-left="0cm"/>
    </style:style>
    <style:style style:name="ce8" style:family="table-cell" style:parent-style-name="Default">
      <style:table-cell-properties style:text-align-source="value-type" style:repeat-content="false" fo:wrap-option="wrap"/>
      <style:paragraph-properties fo:margin-left="0cm"/>
    </style:style>
    <style:style style:name="ce9" style:family="table-cell" style:parent-style-name="Default">
      <style:table-cell-properties style:text-align-source="value-type" style:repeat-content="false"/>
      <style:paragraph-properties fo:margin-left="0cm"/>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游ゴシック"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游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number-columns-repeated="2" table:default-cell-style-name="Default"/>
        <table:table-column table:style-name="co36" table:default-cell-style-name="ce6"/>
        <table:table-column table:style-name="co3" table:default-cell-style-name="ce19"/>
        <table:table-column table:style-name="co37" table:default-cell-style-name="Default"/>
        <table:table-column table:style-name="co38" table:default-cell-style-name="Default"/>
        <table:table-column table:style-name="co6" table:default-cell-style-name="Default"/>
        <table:table-column table:style-name="co39" table:default-cell-style-name="Default"/>
        <table:table-column table:style-name="co40" table:default-cell-style-name="Default"/>
        <table:table-column table:style-name="co39" table:default-cell-style-name="Default"/>
        <table:table-column table:style-name="co9" table:default-cell-style-name="Default"/>
        <table:table-column table:style-name="co39" table:default-cell-style-name="Default"/>
        <table:table-column table:style-name="co10" table:default-cell-style-name="Default"/>
        <table:table-column table:style-name="co39" table:number-columns-repeated="2" table:default-cell-style-name="Default"/>
        <table:table-column table:style-name="co36" table:default-cell-style-name="Default"/>
        <table:table-column table:style-name="co11" table:default-cell-style-name="Default"/>
        <table:table-column table:style-name="co1" table:default-cell-style-name="Default"/>
        <table:table-column table:style-name="co12" table:default-cell-style-name="ce11"/>
        <table:table-column table:style-name="co39" table:default-cell-style-name="Default"/>
        <table:table-column table:style-name="co41" table:default-cell-style-name="Default"/>
        <table:table-column table:style-name="co41" table:default-cell-style-name="ce9"/>
        <table:table-column table:style-name="co39" table:default-cell-style-name="Default"/>
        <table:table-column table:style-name="co42" table:default-cell-style-name="Default"/>
        <table:table-column table:style-name="co15" table:number-columns-repeated="16348" table:default-cell-style-name="Default"/>
        <table:table-row table:style-name="ro4">
          <table:table-cell table:style-name="ce15" office:value-type="string" calcext:value-type="string">
            <text:p>テーブル順</text:p>
          </table:table-cell>
          <table:table-cell table:style-name="ce15" office:value-type="string" calcext:value-type="string">
            <text:p>デッキ順</text:p>
          </table:table-cell>
          <table:table-cell table:style-name="ce16" office:value-type="string" calcext:value-type="string">
            <text:p>ID</text:p>
          </table:table-cell>
          <table:table-cell table:style-name="ce18" office:value-type="string" calcext:value-type="string">
            <text:p>ローカルID</text:p>
          </table:table-cell>
          <table:table-cell table:style-name="ce20" office:value-type="string" calcext:value-type="string">
            <text:p>カード名</text:p>
          </table:table-cell>
          <table:table-cell table:style-name="ce20" office:value-type="string" calcext:value-type="string">
            <text:p>読み仮名</text:p>
          </table:table-cell>
          <table:table-cell table:style-name="ce20" office:value-type="string" calcext:value-type="string">
            <text:p>収録</text:p>
          </table:table-cell>
          <table:table-cell table:style-name="ce15" office:value-type="string" calcext:value-type="string">
            <text:p>収録番号</text:p>
          </table:table-cell>
          <table:table-cell table:style-name="ce15" office:value-type="string" calcext:value-type="string">
            <text:p>レアリティ</text:p>
          </table:table-cell>
          <table:table-cell table:style-name="ce15" office:value-type="string" calcext:value-type="string">
            <text:p>レアリティ番号</text:p>
          </table:table-cell>
          <table:table-cell table:style-name="ce20" office:value-type="string" calcext:value-type="string">
            <text:p>種類</text:p>
          </table:table-cell>
          <table:table-cell table:style-name="ce15" office:value-type="string" calcext:value-type="string">
            <text:p>種類番号</text:p>
          </table:table-cell>
          <table:table-cell table:style-name="ce20" office:value-type="string" calcext:value-type="string">
            <text:p>色</text:p>
          </table:table-cell>
          <table:table-cell table:style-name="ce15" office:value-type="string" calcext:value-type="string">
            <text:p>色番号</text:p>
          </table:table-cell>
          <table:table-cell table:style-name="ce15" office:value-type="string" calcext:value-type="string">
            <text:p>レベル</text:p>
          </table:table-cell>
          <table:table-cell table:style-name="ce15" office:value-type="string" calcext:value-type="string">
            <text:p>魔力コスト</text:p>
          </table:table-cell>
          <table:table-cell table:style-name="ce15" office:value-type="string" calcext:value-type="string">
            <text:p>能力語</text:p>
          </table:table-cell>
          <table:table-cell table:style-name="ce15" office:value-type="string" calcext:value-type="string">
            <text:p>能力語番号</text:p>
          </table:table-cell>
          <table:table-cell table:style-name="ce10" office:value-type="string" calcext:value-type="string">
            <text:p>特性</text:p>
          </table:table-cell>
          <table:table-cell table:style-name="ce15" office:value-type="string" calcext:value-type="string">
            <text:p>特性番号</text:p>
          </table:table-cell>
          <table:table-cell table:style-name="ce14" office:value-type="string" calcext:value-type="string">
            <text:p>ルールテキスト</text:p>
          </table:table-cell>
          <table:table-cell table:style-name="ce15" office:value-type="string" calcext:value-type="string">
            <text:p>遺業能力</text:p>
          </table:table-cell>
          <table:table-cell table:style-name="ce15" office:value-type="string" calcext:value-type="string">
            <text:p>遺業能力番号</text:p>
          </table:table-cell>
          <table:table-cell office:value-type="string" calcext:value-type="string">
            <text:p>画像URL</text:p>
          </table:table-cell>
          <table:table-cell table:style-name="ce20" office:value-type="string" calcext:value-type="string">
            <text:p>JSON</text:p>
          </table:table-cell>
          <table:table-cell table:style-name="ce20" table:number-columns-repeated="16347"/>
        </table:table-row>
        <table:table-row table:style-name="ro2">
          <table:table-cell office:value-type="float" office:value="1" calcext:value-type="float">
            <text:p>1</text:p>
          </table:table-cell>
          <table:table-cell office:value-type="float" office:value="180" calcext:value-type="float">
            <text:p>180</text:p>
          </table:table-cell>
          <table:table-cell office:value-type="string" calcext:value-type="string">
            <text:p>R-1</text:p>
          </table:table-cell>
          <table:table-cell office:value-type="float" office:value="1" calcext:value-type="float">
            <text:p>1</text:p>
          </table:table-cell>
          <table:table-cell office:value-type="string" calcext:value-type="string">
            <text:p>上杉謙信</text:p>
          </table:table-cell>
          <table:table-cell office:value-type="string" calcext:value-type="string">
            <text:p>うえすぎけんしん</text:p>
          </table:table-cell>
          <table:table-cell office:value-type="string" calcext:value-type="string">
            <text:p>伝説の武将デッキ</text:p>
          </table:table-cell>
          <table:table-cell table:formula="of:=VLOOKUP([.G2];[$収録番号.$A$1:$収録番号.$B$9];2;0)" office:value-type="float" office:value="10" calcext:value-type="float">
            <text:p>10</text:p>
          </table:table-cell>
          <table:table-cell office:value-type="string" calcext:value-type="string">
            <text:p>SR</text:p>
          </table:table-cell>
          <table:table-cell table:formula="of:=VLOOKUP([.I2];[$レアリティ番号.$A$1:$レアリティ番号.$B$4];2;0)" office:value-type="float" office:value="4" calcext:value-type="float">
            <text:p>4</text:p>
          </table:table-cell>
          <table:table-cell office:value-type="string" calcext:value-type="string">
            <text:p>イジン</text:p>
          </table:table-cell>
          <table:table-cell table:formula="of:=VLOOKUP([.K2];[$種類番号.$A$1:$種類番号.$B$4];2;0)" office:value-type="float" office:value="1" calcext:value-type="float">
            <text:p>1</text:p>
          </table:table-cell>
          <table:table-cell office:value-type="string" calcext:value-type="string">
            <text:p>赤</text:p>
          </table:table-cell>
          <table:table-cell table:formula="of:=VLOOKUP([.M2];[$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能力語番号.$A$1:$能力語番号.$B$10];2;0);0)" office:value-type="float" office:value="0" calcext:value-type="float">
            <text:p>0</text:p>
          </table:table-cell>
          <table:table-cell office:value-type="string" calcext:value-type="string">
            <text:p>剣術</text:p>
          </table:table-cell>
          <table:table-cell table:formula="of:=IFERROR(VLOOKUP([.$S2];[$特性番号.$A$1:$特性番号.$B$8];2;0);0)" office:value-type="float" office:value="1" calcext:value-type="float">
            <text:p>1</text:p>
          </table:table-cell>
          <table:table-cell office:value-type="string" calcext:value-type="string">
            <text:p>アタッカーになったとき、これのパワー以下のパワーを持つ相手の戦場のイジン1体を破壊する。</text:p>
          </table:table-cell>
          <table:table-cell table:style-name="ce8" table:formula="of:=NA()" office:value-type="string" office:string-value="" calcext:value-type="error">
            <text:p>#N/A</text:p>
          </table:table-cell>
          <table:table-cell table:formula="of:=IFERROR(VLOOKUP([.$V2];[$遺業能力番号.$A$1:$遺業能力番号.$B$9];2;0);0)" office:value-type="float" office:value="0" calcext:value-type="float">
            <text:p>0</text:p>
          </table:table-cell>
          <table:table-cell office:value-type="string" calcext:value-type="string">
            <text:p>https://one-draw.jp/ijinden/cardlist/R01/card/R_001.png</text:p>
          </table:table-cell>
          <table:table-cell table:formula="of:=CONCATENATE([$JSON.$A$1];[.$C2];[$JSON.$B$1];[.$E2];[$JSON.$C$1];[.$F2];[$JSON.$D$1];IF(ISNA([.$S2]);&quot;null&quot;;&quot;&quot;&quot;&quot;&amp;[.$S2]&amp;&quot;&quot;&quot;&quot;);[$JSON.$E$1];[.$U2];[$JSON.$F$1];IF(ISNA([.$V2]);&quot;null&quot;;&quot;&quot;&quot;&quot;&amp;[.$V2]&amp;&quot;&quot;&quot;&quot;);[$JSON.$G$1];[.$X2];[$JSON.$H$1];[.$H2];[$JSON.$I$1];[.J2];[$JSON.$J$1];[.$L2];[$JSON.$K$1];[.$O2];[$JSON.$L$1];[.$N2];[$JSON.$M$1];[.$R2];[$JSON.$N$1];[.$T2];[$JSON.$O$1];[.$W2];[$JSON.$P$1];[.$A2];[$JSON.$Q$1];[.$B2];[$JSON.$R$1])" office:value-type="string" office:string-value="{&quot;id&quot;:&quot;R-1&quot;,&quot;name&quot;:&quot;上杉謙信&quot;,&quot;kana&quot;:&quot;うえすぎけんしん&quot;,&quot;traitText&quot;:&quot;剣術&quot;,&quot;ruleText&quot;:&quot;アタッカーになったとき、これのパワー以下のパワーを持つ相手の戦場のイジン1体を破壊する。&quot;,&quot;legacyText&quot;:null,&quot;imageUrl&quot;:&quot;https://one-draw.jp/ijinden/cardlist/R01/card/R_001.png&quot;,&quot;expansion&quot;:10,&quot;rarity&quot;:4,&quot;type&quot;:1,&quot;level&quot;:6,&quot;color&quot;:1,&quot;term&quot;:0,&quot;trait&quot;:1,&quot;legacy&quot;:0,&quot;orderTable&quot;:1,&quot;orderDeck&quot;:180}," calcext:value-type="string">
            <text:p>{"id":"R-1","name":"上杉謙信","kana":"うえすぎけんしん","traitText":"剣術","ruleText":"アタッカーになったとき、これのパワー以下のパワーを持つ相手の戦場のイジン1体を破壊する。","legacyText":null,"imageUrl":"https://one-draw.jp/ijinden/cardlist/R01/card/R_001.png","expansion":10,"rarity":4,"type":1,"level":6,"color":1,"term":0,"trait":1,"legacy":0,"orderTable":1,"orderDeck":180},</text:p>
          </table:table-cell>
          <table:table-cell table:number-columns-repeated="16347"/>
        </table:table-row>
        <table:table-row table:style-name="ro2">
          <table:table-cell office:value-type="float" office:value="2" calcext:value-type="float">
            <text:p>2</text:p>
          </table:table-cell>
          <table:table-cell office:value-type="float" office:value="1" calcext:value-type="float">
            <text:p>1</text:p>
          </table:table-cell>
          <table:table-cell office:value-type="string" calcext:value-type="string">
            <text:p>R-2</text:p>
          </table:table-cell>
          <table:table-cell office:value-type="float" office:value="2" calcext:value-type="float">
            <text:p>2</text:p>
          </table:table-cell>
          <table:table-cell office:value-type="string" calcext:value-type="string">
            <text:p>源義経</text:p>
          </table:table-cell>
          <table:table-cell office:value-type="string" calcext:value-type="string">
            <text:p>みなもとのよしつね</text:p>
          </table:table-cell>
          <table:table-cell office:value-type="string" calcext:value-type="string">
            <text:p>伝説の武将デッキ</text:p>
          </table:table-cell>
          <table:table-cell table:formula="of:=VLOOKUP([.G3];[$収録番号.$A$1:$収録番号.$B$9];2;0)" office:value-type="float" office:value="10" calcext:value-type="float">
            <text:p>10</text:p>
          </table:table-cell>
          <table:table-cell office:value-type="string" calcext:value-type="string">
            <text:p>N</text:p>
          </table:table-cell>
          <table:table-cell table:formula="of:=VLOOKUP([.I3];[$レアリティ番号.$A$1:$レアリティ番号.$B$4];2;0)" office:value-type="float" office:value="1" calcext:value-type="float">
            <text:p>1</text:p>
          </table:table-cell>
          <table:table-cell office:value-type="string" calcext:value-type="string">
            <text:p>イジン</text:p>
          </table:table-cell>
          <table:table-cell table:formula="of:=VLOOKUP([.K3];[$種類番号.$A$1:$種類番号.$B$4];2;0)" office:value-type="float" office:value="1" calcext:value-type="float">
            <text:p>1</text:p>
          </table:table-cell>
          <table:table-cell office:value-type="string" calcext:value-type="string">
            <text:p>赤</text:p>
          </table:table-cell>
          <table:table-cell table:formula="of:=VLOOKUP([.M3];[$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能力語番号.$A$1:$能力語番号.$B$10];2;0);0)" office:value-type="float" office:value="0" calcext:value-type="float">
            <text:p>0</text:p>
          </table:table-cell>
          <table:table-cell office:value-type="string" calcext:value-type="string">
            <text:p>剣術</text:p>
          </table:table-cell>
          <table:table-cell table:formula="of:=IFERROR(VLOOKUP([.$S3];[$特性番号.$A$1:$特性番号.$B$8];2;0);0)" office:value-type="float" office:value="1" calcext:value-type="float">
            <text:p>1</text:p>
          </table:table-cell>
          <table:table-cell office:value-type="string" calcext:value-type="string">
            <text:p>即応</text:p>
          </table:table-cell>
          <table:table-cell table:style-name="ce8" office:value-type="string" calcext:value-type="string">
            <text:p>魔力化</text:p>
          </table:table-cell>
          <table:table-cell table:formula="of:=IFERROR(VLOOKUP([.$V3];[$遺業能力番号.$A$1:$遺業能力番号.$B$9];2;0);0)" office:value-type="float" office:value="1" calcext:value-type="float">
            <text:p>1</text:p>
          </table:table-cell>
          <table:table-cell office:value-type="string" calcext:value-type="string">
            <text:p>https://one-draw.jp/ijinden/cardlist/R01/card/R_002.png</text:p>
          </table:table-cell>
          <table:table-cell table:formula="of:=CONCATENATE([$JSON.$A$1];[.$C3];[$JSON.$B$1];[.$E3];[$JSON.$C$1];[.$F3];[$JSON.$D$1];IF(ISNA([.$S3]);&quot;null&quot;;&quot;&quot;&quot;&quot;&amp;[.$S3]&amp;&quot;&quot;&quot;&quot;);[$JSON.$E$1];[.$U3];[$JSON.$F$1];IF(ISNA([.$V3]);&quot;null&quot;;&quot;&quot;&quot;&quot;&amp;[.$V3]&amp;&quot;&quot;&quot;&quot;);[$JSON.$G$1];[.$X3];[$JSON.$H$1];[.$H3];[$JSON.$I$1];[.J3];[$JSON.$J$1];[.$L3];[$JSON.$K$1];[.$O3];[$JSON.$L$1];[.$N3];[$JSON.$M$1];[.$R3];[$JSON.$N$1];[.$T3];[$JSON.$O$1];[.$W3];[$JSON.$P$1];[.$A3];[$JSON.$Q$1];[.$B3];[$JSON.$R$1])" office:value-type="string" office:string-value="{&quot;id&quot;:&quot;R-2&quot;,&quot;name&quot;:&quot;源義経&quot;,&quot;kana&quot;:&quot;みなもとのよしつね&quot;,&quot;traitText&quot;:&quot;剣術&quot;,&quot;ruleText&quot;:&quot;即応&quot;,&quot;legacyText&quot;:&quot;魔力化&quot;,&quot;imageUrl&quot;:&quot;https://one-draw.jp/ijinden/cardlist/R01/card/R_002.png&quot;,&quot;expansion&quot;:10,&quot;rarity&quot;:1,&quot;type&quot;:1,&quot;level&quot;:1,&quot;color&quot;:1,&quot;term&quot;:0,&quot;trait&quot;:1,&quot;legacy&quot;:1,&quot;orderTable&quot;:2,&quot;orderDeck&quot;:1}," calcext:value-type="string">
            <text:p>{"id":"R-2","name":"源義経","kana":"みなもとのよしつね","traitText":"剣術","ruleText":"即応","legacyText":"魔力化","imageUrl":"https://one-draw.jp/ijinden/cardlist/R01/card/R_002.png","expansion":10,"rarity":1,"type":1,"level":1,"color":1,"term":0,"trait":1,"legacy":1,"orderTable":2,"orderDeck":1},</text:p>
          </table:table-cell>
          <table:table-cell table:number-columns-repeated="16347"/>
        </table:table-row>
        <table:table-row table:style-name="ro2">
          <table:table-cell office:value-type="float" office:value="3" calcext:value-type="float">
            <text:p>3</text:p>
          </table:table-cell>
          <table:table-cell office:value-type="float" office:value="24" calcext:value-type="float">
            <text:p>24</text:p>
          </table:table-cell>
          <table:table-cell office:value-type="string" calcext:value-type="string">
            <text:p>R-3</text:p>
          </table:table-cell>
          <table:table-cell office:value-type="float" office:value="3" calcext:value-type="float">
            <text:p>3</text:p>
          </table:table-cell>
          <table:table-cell office:value-type="string" calcext:value-type="string">
            <text:p>武田勝頼</text:p>
          </table:table-cell>
          <table:table-cell office:value-type="string" calcext:value-type="string">
            <text:p>たけだかつより</text:p>
          </table:table-cell>
          <table:table-cell office:value-type="string" calcext:value-type="string">
            <text:p>伝説の武将デッキ</text:p>
          </table:table-cell>
          <table:table-cell table:formula="of:=VLOOKUP([.G4];[$収録番号.$A$1:$収録番号.$B$9];2;0)" office:value-type="float" office:value="10" calcext:value-type="float">
            <text:p>10</text:p>
          </table:table-cell>
          <table:table-cell office:value-type="string" calcext:value-type="string">
            <text:p>N</text:p>
          </table:table-cell>
          <table:table-cell table:formula="of:=VLOOKUP([.I4];[$レアリティ番号.$A$1:$レアリティ番号.$B$4];2;0)" office:value-type="float" office:value="1" calcext:value-type="float">
            <text:p>1</text:p>
          </table:table-cell>
          <table:table-cell office:value-type="string" calcext:value-type="string">
            <text:p>イジン</text:p>
          </table:table-cell>
          <table:table-cell table:formula="of:=VLOOKUP([.K4];[$種類番号.$A$1:$種類番号.$B$4];2;0)" office:value-type="float" office:value="1" calcext:value-type="float">
            <text:p>1</text:p>
          </table:table-cell>
          <table:table-cell office:value-type="string" calcext:value-type="string">
            <text:p>赤</text:p>
          </table:table-cell>
          <table:table-cell table:formula="of:=VLOOKUP([.M4];[$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能力語番号.$A$1:$能力語番号.$B$10];2;0);0)" office:value-type="float" office:value="0" calcext:value-type="float">
            <text:p>0</text:p>
          </table:table-cell>
          <table:table-cell office:value-type="string" calcext:value-type="string">
            <text:p>剣術</text:p>
          </table:table-cell>
          <table:table-cell table:formula="of:=IFERROR(VLOOKUP([.$S4];[$特性番号.$A$1:$特性番号.$B$8];2;0);0)" office:value-type="float" office:value="1" calcext:value-type="float">
            <text:p>1</text:p>
          </table:table-cell>
          <table:table-cell office:value-type="string" calcext:value-type="string">
            <text:p>アタック+2000</text:p>
          </table:table-cell>
          <table:table-cell table:style-name="ce8" office:value-type="string" calcext:value-type="string">
            <text:p>1ドローする</text:p>
          </table:table-cell>
          <table:table-cell table:formula="of:=IFERROR(VLOOKUP([.$V4];[$遺業能力番号.$A$1:$遺業能力番号.$B$9];2;0);0)" office:value-type="float" office:value="4" calcext:value-type="float">
            <text:p>4</text:p>
          </table:table-cell>
          <table:table-cell office:value-type="string" calcext:value-type="string">
            <text:p>https://one-draw.jp/ijinden/cardlist/R01/card/R_003.png</text:p>
          </table:table-cell>
          <table:table-cell table:formula="of:=CONCATENATE([$JSON.$A$1];[.$C4];[$JSON.$B$1];[.$E4];[$JSON.$C$1];[.$F4];[$JSON.$D$1];IF(ISNA([.$S4]);&quot;null&quot;;&quot;&quot;&quot;&quot;&amp;[.$S4]&amp;&quot;&quot;&quot;&quot;);[$JSON.$E$1];[.$U4];[$JSON.$F$1];IF(ISNA([.$V4]);&quot;null&quot;;&quot;&quot;&quot;&quot;&amp;[.$V4]&amp;&quot;&quot;&quot;&quot;);[$JSON.$G$1];[.$X4];[$JSON.$H$1];[.$H4];[$JSON.$I$1];[.J4];[$JSON.$J$1];[.$L4];[$JSON.$K$1];[.$O4];[$JSON.$L$1];[.$N4];[$JSON.$M$1];[.$R4];[$JSON.$N$1];[.$T4];[$JSON.$O$1];[.$W4];[$JSON.$P$1];[.$A4];[$JSON.$Q$1];[.$B4];[$JSON.$R$1])" office:value-type="string" office:string-value="{&quot;id&quot;:&quot;R-3&quot;,&quot;name&quot;:&quot;武田勝頼&quot;,&quot;kana&quot;:&quot;たけだかつより&quot;,&quot;traitText&quot;:&quot;剣術&quot;,&quot;ruleText&quot;:&quot;アタック+2000&quot;,&quot;legacyText&quot;:&quot;1ドローする&quot;,&quot;imageUrl&quot;:&quot;https://one-draw.jp/ijinden/cardlist/R01/card/R_003.png&quot;,&quot;expansion&quot;:10,&quot;rarity&quot;:1,&quot;type&quot;:1,&quot;level&quot;:2,&quot;color&quot;:1,&quot;term&quot;:0,&quot;trait&quot;:1,&quot;legacy&quot;:4,&quot;orderTable&quot;:3,&quot;orderDeck&quot;:24}," calcext:value-type="string">
            <text:p>{"id":"R-3","name":"武田勝頼","kana":"たけだかつより","traitText":"剣術","ruleText":"アタック+2000","legacyText":"1ドローする","imageUrl":"https://one-draw.jp/ijinden/cardlist/R01/card/R_003.png","expansion":10,"rarity":1,"type":1,"level":2,"color":1,"term":0,"trait":1,"legacy":4,"orderTable":3,"orderDeck":24},</text:p>
          </table:table-cell>
          <table:table-cell table:number-columns-repeated="16347"/>
        </table:table-row>
        <table:table-row table:style-name="ro2">
          <table:table-cell office:value-type="float" office:value="4" calcext:value-type="float">
            <text:p>4</text:p>
          </table:table-cell>
          <table:table-cell office:value-type="float" office:value="63" calcext:value-type="float">
            <text:p>63</text:p>
          </table:table-cell>
          <table:table-cell office:value-type="string" calcext:value-type="string">
            <text:p>R-4</text:p>
          </table:table-cell>
          <table:table-cell office:value-type="float" office:value="4" calcext:value-type="float">
            <text:p>4</text:p>
          </table:table-cell>
          <table:table-cell office:value-type="string" calcext:value-type="string">
            <text:p>ヴラド・ツェペシュ</text:p>
          </table:table-cell>
          <table:table-cell office:value-type="string" calcext:value-type="string">
            <text:p>ゔらどつぇぺしゅ</text:p>
          </table:table-cell>
          <table:table-cell office:value-type="string" calcext:value-type="string">
            <text:p>伝説の武将デッキ</text:p>
          </table:table-cell>
          <table:table-cell table:formula="of:=VLOOKUP([.G5];[$収録番号.$A$1:$収録番号.$B$9];2;0)" office:value-type="float" office:value="10" calcext:value-type="float">
            <text:p>10</text:p>
          </table:table-cell>
          <table:table-cell office:value-type="string" calcext:value-type="string">
            <text:p>N</text:p>
          </table:table-cell>
          <table:table-cell table:formula="of:=VLOOKUP([.I5];[$レアリティ番号.$A$1:$レアリティ番号.$B$4];2;0)" office:value-type="float" office:value="1" calcext:value-type="float">
            <text:p>1</text:p>
          </table:table-cell>
          <table:table-cell office:value-type="string" calcext:value-type="string">
            <text:p>イジン</text:p>
          </table:table-cell>
          <table:table-cell table:formula="of:=VLOOKUP([.K5];[$種類番号.$A$1:$種類番号.$B$4];2;0)" office:value-type="float" office:value="1" calcext:value-type="float">
            <text:p>1</text:p>
          </table:table-cell>
          <table:table-cell office:value-type="string" calcext:value-type="string">
            <text:p>赤</text:p>
          </table:table-cell>
          <table:table-cell table:formula="of:=VLOOKUP([.M5];[$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特性番号.$A$1:$特性番号.$B$8];2;0);0)" office:value-type="float" office:value="0" calcext:value-type="float">
            <text:p>0</text:p>
          </table:table-cell>
          <table:table-cell office:value-type="string" calcext:value-type="string">
            <text:p>アタッカーになったとき、自分の魔力ゾーンのマリョク1つを裏にして発動できる。パワー2000以下の相手の戦場のイジン1体を破壊する。</text:p>
          </table:table-cell>
          <table:table-cell table:style-name="ce8" table:formula="of:=NA()" office:value-type="string" office:string-value="" calcext:value-type="error">
            <text:p>#N/A</text:p>
          </table:table-cell>
          <table:table-cell table:formula="of:=IFERROR(VLOOKUP([.$V5];[$遺業能力番号.$A$1:$遺業能力番号.$B$9];2;0);0)" office:value-type="float" office:value="0" calcext:value-type="float">
            <text:p>0</text:p>
          </table:table-cell>
          <table:table-cell office:value-type="string" calcext:value-type="string">
            <text:p>https://one-draw.jp/ijinden/cardlist/R01/card/R_004.png</text:p>
          </table:table-cell>
          <table:table-cell table:formula="of:=CONCATENATE([$JSON.$A$1];[.$C5];[$JSON.$B$1];[.$E5];[$JSON.$C$1];[.$F5];[$JSON.$D$1];IF(ISNA([.$S5]);&quot;null&quot;;&quot;&quot;&quot;&quot;&amp;[.$S5]&amp;&quot;&quot;&quot;&quot;);[$JSON.$E$1];[.$U5];[$JSON.$F$1];IF(ISNA([.$V5]);&quot;null&quot;;&quot;&quot;&quot;&quot;&amp;[.$V5]&amp;&quot;&quot;&quot;&quot;);[$JSON.$G$1];[.$X5];[$JSON.$H$1];[.$H5];[$JSON.$I$1];[.J5];[$JSON.$J$1];[.$L5];[$JSON.$K$1];[.$O5];[$JSON.$L$1];[.$N5];[$JSON.$M$1];[.$R5];[$JSON.$N$1];[.$T5];[$JSON.$O$1];[.$W5];[$JSON.$P$1];[.$A5];[$JSON.$Q$1];[.$B5];[$JSON.$R$1])" office:value-type="string" office:string-value="{&quot;id&quot;:&quot;R-4&quot;,&quot;name&quot;:&quot;ヴラド・ツェペシュ&quot;,&quot;kana&quot;:&quot;ゔらどつぇぺしゅ&quot;,&quot;traitText&quot;:null,&quot;ruleText&quot;:&quot;アタッカーになったとき、自分の魔力ゾーンのマリョク1つを裏にして発動できる。パワー2000以下の相手の戦場のイジン1体を破壊する。&quot;,&quot;legacyText&quot;:null,&quot;imageUrl&quot;:&quot;https://one-draw.jp/ijinden/cardlist/R01/card/R_004.png&quot;,&quot;expansion&quot;:10,&quot;rarity&quot;:1,&quot;type&quot;:1,&quot;level&quot;:3,&quot;color&quot;:1,&quot;term&quot;:0,&quot;trait&quot;:0,&quot;legacy&quot;:0,&quot;orderTable&quot;:4,&quot;orderDeck&quot;:63}," calcext:value-type="string">
            <text:p>{"id":"R-4","name":"ヴラド・ツェペシュ","kana":"ゔらどつぇぺしゅ","traitText":null,"ruleText":"アタッカーになったとき、自分の魔力ゾーンのマリョク1つを裏にして発動できる。パワー2000以下の相手の戦場のイジン1体を破壊する。","legacyText":null,"imageUrl":"https://one-draw.jp/ijinden/cardlist/R01/card/R_004.png","expansion":10,"rarity":1,"type":1,"level":3,"color":1,"term":0,"trait":0,"legacy":0,"orderTable":4,"orderDeck":63},</text:p>
          </table:table-cell>
          <table:table-cell table:number-columns-repeated="16347"/>
        </table:table-row>
        <table:table-row table:style-name="ro2">
          <table:table-cell office:value-type="float" office:value="5" calcext:value-type="float">
            <text:p>5</text:p>
          </table:table-cell>
          <table:table-cell office:value-type="float" office:value="106" calcext:value-type="float">
            <text:p>106</text:p>
          </table:table-cell>
          <table:table-cell office:value-type="string" calcext:value-type="string">
            <text:p>R-5</text:p>
          </table:table-cell>
          <table:table-cell office:value-type="float" office:value="5" calcext:value-type="float">
            <text:p>5</text:p>
          </table:table-cell>
          <table:table-cell office:value-type="string" calcext:value-type="string">
            <text:p>坂上田村麻呂</text:p>
          </table:table-cell>
          <table:table-cell office:value-type="string" calcext:value-type="string">
            <text:p>さかのうえのたむらまろ</text:p>
          </table:table-cell>
          <table:table-cell office:value-type="string" calcext:value-type="string">
            <text:p>伝説の武将デッキ</text:p>
          </table:table-cell>
          <table:table-cell table:formula="of:=VLOOKUP([.G6];[$収録番号.$A$1:$収録番号.$B$9];2;0)" office:value-type="float" office:value="10" calcext:value-type="float">
            <text:p>10</text:p>
          </table:table-cell>
          <table:table-cell office:value-type="string" calcext:value-type="string">
            <text:p>N</text:p>
          </table:table-cell>
          <table:table-cell table:formula="of:=VLOOKUP([.I6];[$レアリティ番号.$A$1:$レアリティ番号.$B$4];2;0)" office:value-type="float" office:value="1" calcext:value-type="float">
            <text:p>1</text:p>
          </table:table-cell>
          <table:table-cell office:value-type="string" calcext:value-type="string">
            <text:p>イジン</text:p>
          </table:table-cell>
          <table:table-cell table:formula="of:=VLOOKUP([.K6];[$種類番号.$A$1:$種類番号.$B$4];2;0)" office:value-type="float" office:value="1" calcext:value-type="float">
            <text:p>1</text:p>
          </table:table-cell>
          <table:table-cell office:value-type="string" calcext:value-type="string">
            <text:p>赤</text:p>
          </table:table-cell>
          <table:table-cell table:formula="of:=VLOOKUP([.M6];[$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能力語番号.$A$1:$能力語番号.$B$10];2;0);0)" office:value-type="float" office:value="0" calcext:value-type="float">
            <text:p>0</text:p>
          </table:table-cell>
          <table:table-cell office:value-type="string" calcext:value-type="string">
            <text:p>剣術</text:p>
          </table:table-cell>
          <table:table-cell table:formula="of:=IFERROR(VLOOKUP([.$S6];[$特性番号.$A$1:$特性番号.$B$8];2;0);0)" office:value-type="float" office:value="1" calcext:value-type="float">
            <text:p>1</text:p>
          </table:table-cell>
          <table:table-cell office:value-type="string" calcext:value-type="string">
            <text:p>ダブルプレッシャー</text:p>
          </table:table-cell>
          <table:table-cell table:style-name="ce8" table:formula="of:=NA()" office:value-type="string" office:string-value="" calcext:value-type="error">
            <text:p>#N/A</text:p>
          </table:table-cell>
          <table:table-cell table:formula="of:=IFERROR(VLOOKUP([.$V6];[$遺業能力番号.$A$1:$遺業能力番号.$B$9];2;0);0)" office:value-type="float" office:value="0" calcext:value-type="float">
            <text:p>0</text:p>
          </table:table-cell>
          <table:table-cell office:value-type="string" calcext:value-type="string">
            <text:p>https://one-draw.jp/ijinden/cardlist/R01/card/R_005.png</text:p>
          </table:table-cell>
          <table:table-cell table:formula="of:=CONCATENATE([$JSON.$A$1];[.$C6];[$JSON.$B$1];[.$E6];[$JSON.$C$1];[.$F6];[$JSON.$D$1];IF(ISNA([.$S6]);&quot;null&quot;;&quot;&quot;&quot;&quot;&amp;[.$S6]&amp;&quot;&quot;&quot;&quot;);[$JSON.$E$1];[.$U6];[$JSON.$F$1];IF(ISNA([.$V6]);&quot;null&quot;;&quot;&quot;&quot;&quot;&amp;[.$V6]&amp;&quot;&quot;&quot;&quot;);[$JSON.$G$1];[.$X6];[$JSON.$H$1];[.$H6];[$JSON.$I$1];[.J6];[$JSON.$J$1];[.$L6];[$JSON.$K$1];[.$O6];[$JSON.$L$1];[.$N6];[$JSON.$M$1];[.$R6];[$JSON.$N$1];[.$T6];[$JSON.$O$1];[.$W6];[$JSON.$P$1];[.$A6];[$JSON.$Q$1];[.$B6];[$JSON.$R$1])" office:value-type="string" office:string-value="{&quot;id&quot;:&quot;R-5&quot;,&quot;name&quot;:&quot;坂上田村麻呂&quot;,&quot;kana&quot;:&quot;さかのうえのたむらまろ&quot;,&quot;traitText&quot;:&quot;剣術&quot;,&quot;ruleText&quot;:&quot;ダブルプレッシャー&quot;,&quot;legacyText&quot;:null,&quot;imageUrl&quot;:&quot;https://one-draw.jp/ijinden/cardlist/R01/card/R_005.png&quot;,&quot;expansion&quot;:10,&quot;rarity&quot;:1,&quot;type&quot;:1,&quot;level&quot;:4,&quot;color&quot;:1,&quot;term&quot;:0,&quot;trait&quot;:1,&quot;legacy&quot;:0,&quot;orderTable&quot;:5,&quot;orderDeck&quot;:106}," calcext:value-type="string">
            <text:p>{"id":"R-5","name":"坂上田村麻呂","kana":"さかのうえのたむらまろ","traitText":"剣術","ruleText":"ダブルプレッシャー","legacyText":null,"imageUrl":"https://one-draw.jp/ijinden/cardlist/R01/card/R_005.png","expansion":10,"rarity":1,"type":1,"level":4,"color":1,"term":0,"trait":1,"legacy":0,"orderTable":5,"orderDeck":106},</text:p>
          </table:table-cell>
          <table:table-cell table:number-columns-repeated="16347"/>
        </table:table-row>
        <table:table-row table:style-name="ro2">
          <table:table-cell office:value-type="float" office:value="6" calcext:value-type="float">
            <text:p>6</text:p>
          </table:table-cell>
          <table:table-cell office:value-type="float" office:value="143" calcext:value-type="float">
            <text:p>143</text:p>
          </table:table-cell>
          <table:table-cell office:value-type="string" calcext:value-type="string">
            <text:p>R-6</text:p>
          </table:table-cell>
          <table:table-cell office:value-type="float" office:value="6" calcext:value-type="float">
            <text:p>6</text:p>
          </table:table-cell>
          <table:table-cell office:value-type="string" calcext:value-type="string">
            <text:p>楠木正成</text:p>
          </table:table-cell>
          <table:table-cell office:value-type="string" calcext:value-type="string">
            <text:p>くすのきまさしげ</text:p>
          </table:table-cell>
          <table:table-cell office:value-type="string" calcext:value-type="string">
            <text:p>伝説の武将デッキ</text:p>
          </table:table-cell>
          <table:table-cell table:formula="of:=VLOOKUP([.G7];[$収録番号.$A$1:$収録番号.$B$9];2;0)" office:value-type="float" office:value="10" calcext:value-type="float">
            <text:p>10</text:p>
          </table:table-cell>
          <table:table-cell office:value-type="string" calcext:value-type="string">
            <text:p>N</text:p>
          </table:table-cell>
          <table:table-cell table:formula="of:=VLOOKUP([.I7];[$レアリティ番号.$A$1:$レアリティ番号.$B$4];2;0)" office:value-type="float" office:value="1" calcext:value-type="float">
            <text:p>1</text:p>
          </table:table-cell>
          <table:table-cell office:value-type="string" calcext:value-type="string">
            <text:p>イジン</text:p>
          </table:table-cell>
          <table:table-cell table:formula="of:=VLOOKUP([.K7];[$種類番号.$A$1:$種類番号.$B$4];2;0)" office:value-type="float" office:value="1" calcext:value-type="float">
            <text:p>1</text:p>
          </table:table-cell>
          <table:table-cell office:value-type="string" calcext:value-type="string">
            <text:p>赤</text:p>
          </table:table-cell>
          <table:table-cell table:formula="of:=VLOOKUP([.M7];[$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能力語番号.$A$1:$能力語番号.$B$10];2;0);0)" office:value-type="float" office:value="0" calcext:value-type="float">
            <text:p>0</text:p>
          </table:table-cell>
          <table:table-cell office:value-type="string" calcext:value-type="string">
            <text:p>剣術</text:p>
          </table:table-cell>
          <table:table-cell table:formula="of:=IFERROR(VLOOKUP([.$S7];[$特性番号.$A$1:$特性番号.$B$8];2;0);0)" office:value-type="float" office:value="1" calcext:value-type="float">
            <text:p>1</text:p>
          </table:table-cell>
          <table:table-cell office:value-type="string" calcext:value-type="string">
            <text:p>戦場に置かれたとき、イジン召喚権+1する。</text:p>
          </table:table-cell>
          <table:table-cell table:style-name="ce8" table:formula="of:=NA()" office:value-type="string" office:string-value="" calcext:value-type="error">
            <text:p>#N/A</text:p>
          </table:table-cell>
          <table:table-cell table:formula="of:=IFERROR(VLOOKUP([.$V7];[$遺業能力番号.$A$1:$遺業能力番号.$B$9];2;0);0)" office:value-type="float" office:value="0" calcext:value-type="float">
            <text:p>0</text:p>
          </table:table-cell>
          <table:table-cell office:value-type="string" calcext:value-type="string">
            <text:p>https://one-draw.jp/ijinden/cardlist/R01/card/R_006.png</text:p>
          </table:table-cell>
          <table:table-cell table:formula="of:=CONCATENATE([$JSON.$A$1];[.$C7];[$JSON.$B$1];[.$E7];[$JSON.$C$1];[.$F7];[$JSON.$D$1];IF(ISNA([.$S7]);&quot;null&quot;;&quot;&quot;&quot;&quot;&amp;[.$S7]&amp;&quot;&quot;&quot;&quot;);[$JSON.$E$1];[.$U7];[$JSON.$F$1];IF(ISNA([.$V7]);&quot;null&quot;;&quot;&quot;&quot;&quot;&amp;[.$V7]&amp;&quot;&quot;&quot;&quot;);[$JSON.$G$1];[.$X7];[$JSON.$H$1];[.$H7];[$JSON.$I$1];[.J7];[$JSON.$J$1];[.$L7];[$JSON.$K$1];[.$O7];[$JSON.$L$1];[.$N7];[$JSON.$M$1];[.$R7];[$JSON.$N$1];[.$T7];[$JSON.$O$1];[.$W7];[$JSON.$P$1];[.$A7];[$JSON.$Q$1];[.$B7];[$JSON.$R$1])" office:value-type="string" office:string-value="{&quot;id&quot;:&quot;R-6&quot;,&quot;name&quot;:&quot;楠木正成&quot;,&quot;kana&quot;:&quot;くすのきまさしげ&quot;,&quot;traitText&quot;:&quot;剣術&quot;,&quot;ruleText&quot;:&quot;戦場に置かれたとき、イジン召喚権+1する。&quot;,&quot;legacyText&quot;:null,&quot;imageUrl&quot;:&quot;https://one-draw.jp/ijinden/cardlist/R01/card/R_006.png&quot;,&quot;expansion&quot;:10,&quot;rarity&quot;:1,&quot;type&quot;:1,&quot;level&quot;:5,&quot;color&quot;:1,&quot;term&quot;:0,&quot;trait&quot;:1,&quot;legacy&quot;:0,&quot;orderTable&quot;:6,&quot;orderDeck&quot;:143}," calcext:value-type="string">
            <text:p>{"id":"R-6","name":"楠木正成","kana":"くすのきまさしげ","traitText":"剣術","ruleText":"戦場に置かれたとき、イジン召喚権+1する。","legacyText":null,"imageUrl":"https://one-draw.jp/ijinden/cardlist/R01/card/R_006.png","expansion":10,"rarity":1,"type":1,"level":5,"color":1,"term":0,"trait":1,"legacy":0,"orderTable":6,"orderDeck":143},</text:p>
          </table:table-cell>
          <table:table-cell table:number-columns-repeated="16347"/>
        </table:table-row>
        <table:table-row table:style-name="ro2">
          <table:table-cell office:value-type="float" office:value="7" calcext:value-type="float">
            <text:p>7</text:p>
          </table:table-cell>
          <table:table-cell office:value-type="float" office:value="144" calcext:value-type="float">
            <text:p>144</text:p>
          </table:table-cell>
          <table:table-cell office:value-type="string" calcext:value-type="string">
            <text:p>R-7</text:p>
          </table:table-cell>
          <table:table-cell office:value-type="float" office:value="7" calcext:value-type="float">
            <text:p>7</text:p>
          </table:table-cell>
          <table:table-cell office:value-type="string" calcext:value-type="string">
            <text:p>ジェームズ・バトラー・ヒコック</text:p>
          </table:table-cell>
          <table:table-cell office:value-type="string" calcext:value-type="string">
            <text:p>じぇーむずばとらーひこっく</text:p>
          </table:table-cell>
          <table:table-cell office:value-type="string" calcext:value-type="string">
            <text:p>伝説の武将デッキ</text:p>
          </table:table-cell>
          <table:table-cell table:formula="of:=VLOOKUP([.G8];[$収録番号.$A$1:$収録番号.$B$9];2;0)" office:value-type="float" office:value="10" calcext:value-type="float">
            <text:p>10</text:p>
          </table:table-cell>
          <table:table-cell office:value-type="string" calcext:value-type="string">
            <text:p>N</text:p>
          </table:table-cell>
          <table:table-cell table:formula="of:=VLOOKUP([.I8];[$レアリティ番号.$A$1:$レアリティ番号.$B$4];2;0)" office:value-type="float" office:value="1" calcext:value-type="float">
            <text:p>1</text:p>
          </table:table-cell>
          <table:table-cell office:value-type="string" calcext:value-type="string">
            <text:p>イジン</text:p>
          </table:table-cell>
          <table:table-cell table:formula="of:=VLOOKUP([.K8];[$種類番号.$A$1:$種類番号.$B$4];2;0)" office:value-type="float" office:value="1" calcext:value-type="float">
            <text:p>1</text:p>
          </table:table-cell>
          <table:table-cell office:value-type="string" calcext:value-type="string">
            <text:p>赤</text:p>
          </table:table-cell>
          <table:table-cell table:formula="of:=VLOOKUP([.M8];[$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8];[$特性番号.$A$1:$特性番号.$B$8];2;0);0)" office:value-type="float" office:value="0" calcext:value-type="float">
            <text:p>0</text:p>
          </table:table-cell>
          <table:table-cell office:value-type="string" calcext:value-type="string">
            <text:p>即応¶アタッカーになったとき、相手の戦場のハイケイ1つにつき1ドローする。</text:p>
          </table:table-cell>
          <table:table-cell table:style-name="ce8" table:formula="of:=NA()" office:value-type="string" office:string-value="" calcext:value-type="error">
            <text:p>#N/A</text:p>
          </table:table-cell>
          <table:table-cell table:formula="of:=IFERROR(VLOOKUP([.$V8];[$遺業能力番号.$A$1:$遺業能力番号.$B$9];2;0);0)" office:value-type="float" office:value="0" calcext:value-type="float">
            <text:p>0</text:p>
          </table:table-cell>
          <table:table-cell office:value-type="string" calcext:value-type="string">
            <text:p>https://one-draw.jp/ijinden/cardlist/R01/card/R_007.png</text:p>
          </table:table-cell>
          <table:table-cell table:formula="of:=CONCATENATE([$JSON.$A$1];[.$C8];[$JSON.$B$1];[.$E8];[$JSON.$C$1];[.$F8];[$JSON.$D$1];IF(ISNA([.$S8]);&quot;null&quot;;&quot;&quot;&quot;&quot;&amp;[.$S8]&amp;&quot;&quot;&quot;&quot;);[$JSON.$E$1];[.$U8];[$JSON.$F$1];IF(ISNA([.$V8]);&quot;null&quot;;&quot;&quot;&quot;&quot;&amp;[.$V8]&amp;&quot;&quot;&quot;&quot;);[$JSON.$G$1];[.$X8];[$JSON.$H$1];[.$H8];[$JSON.$I$1];[.J8];[$JSON.$J$1];[.$L8];[$JSON.$K$1];[.$O8];[$JSON.$L$1];[.$N8];[$JSON.$M$1];[.$R8];[$JSON.$N$1];[.$T8];[$JSON.$O$1];[.$W8];[$JSON.$P$1];[.$A8];[$JSON.$Q$1];[.$B8];[$JSON.$R$1])" office:value-type="string" office:string-value="{&quot;id&quot;:&quot;R-7&quot;,&quot;name&quot;:&quot;ジェームズ・バトラー・ヒコック&quot;,&quot;kana&quot;:&quot;じぇーむずばとらーひこっく&quot;,&quot;traitText&quot;:null,&quot;ruleText&quot;:&quot;即応¶アタッカーになったとき、相手の戦場のハイケイ1つにつき1ドローする。&quot;,&quot;legacyText&quot;:null,&quot;imageUrl&quot;:&quot;https://one-draw.jp/ijinden/cardlist/R01/card/R_007.png&quot;,&quot;expansion&quot;:10,&quot;rarity&quot;:1,&quot;type&quot;:1,&quot;level&quot;:5,&quot;color&quot;:1,&quot;term&quot;:0,&quot;trait&quot;:0,&quot;legacy&quot;:0,&quot;orderTable&quot;:7,&quot;orderDeck&quot;:144}," calcext:value-type="string">
            <text:p>{"id":"R-7","name":"ジェームズ・バトラー・ヒコック","kana":"じぇーむずばとらーひこっく","traitText":null,"ruleText":"即応¶アタッカーになったとき、相手の戦場のハイケイ1つにつき1ドローする。","legacyText":null,"imageUrl":"https://one-draw.jp/ijinden/cardlist/R01/card/R_007.png","expansion":10,"rarity":1,"type":1,"level":5,"color":1,"term":0,"trait":0,"legacy":0,"orderTable":7,"orderDeck":144},</text:p>
          </table:table-cell>
          <table:table-cell table:number-columns-repeated="16347"/>
        </table:table-row>
        <table:table-row table:style-name="ro2">
          <table:table-cell office:value-type="float" office:value="8" calcext:value-type="float">
            <text:p>8</text:p>
          </table:table-cell>
          <table:table-cell office:value-type="float" office:value="181" calcext:value-type="float">
            <text:p>181</text:p>
          </table:table-cell>
          <table:table-cell office:value-type="string" calcext:value-type="string">
            <text:p>R-8</text:p>
          </table:table-cell>
          <table:table-cell office:value-type="float" office:value="8" calcext:value-type="float">
            <text:p>8</text:p>
          </table:table-cell>
          <table:table-cell office:value-type="string" calcext:value-type="string">
            <text:p>アレクサンドロス大王</text:p>
          </table:table-cell>
          <table:table-cell office:value-type="string" calcext:value-type="string">
            <text:p>あれくさんどろすだいおう</text:p>
          </table:table-cell>
          <table:table-cell office:value-type="string" calcext:value-type="string">
            <text:p>伝説の武将デッキ</text:p>
          </table:table-cell>
          <table:table-cell table:formula="of:=VLOOKUP([.G9];[$収録番号.$A$1:$収録番号.$B$9];2;0)" office:value-type="float" office:value="10" calcext:value-type="float">
            <text:p>10</text:p>
          </table:table-cell>
          <table:table-cell office:value-type="string" calcext:value-type="string">
            <text:p>N</text:p>
          </table:table-cell>
          <table:table-cell table:formula="of:=VLOOKUP([.I9];[$レアリティ番号.$A$1:$レアリティ番号.$B$4];2;0)" office:value-type="float" office:value="1" calcext:value-type="float">
            <text:p>1</text:p>
          </table:table-cell>
          <table:table-cell office:value-type="string" calcext:value-type="string">
            <text:p>イジン</text:p>
          </table:table-cell>
          <table:table-cell table:formula="of:=VLOOKUP([.K9];[$種類番号.$A$1:$種類番号.$B$4];2;0)" office:value-type="float" office:value="1" calcext:value-type="float">
            <text:p>1</text:p>
          </table:table-cell>
          <table:table-cell office:value-type="string" calcext:value-type="string">
            <text:p>赤</text:p>
          </table:table-cell>
          <table:table-cell table:formula="of:=VLOOKUP([.M9];[$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特性番号.$A$1:$特性番号.$B$8];2;0);0)" office:value-type="float" office:value="0" calcext:value-type="float">
            <text:p>0</text:p>
          </table:table-cell>
          <table:table-cell office:value-type="string" calcext:value-type="string">
            <text:p>即応¶アタッカーになったとき、アタッカー1体につき相手の戦場のハイケイ1つを破壊する。</text:p>
          </table:table-cell>
          <table:table-cell table:style-name="ce8" table:formula="of:=NA()" office:value-type="string" office:string-value="" calcext:value-type="error">
            <text:p>#N/A</text:p>
          </table:table-cell>
          <table:table-cell table:formula="of:=IFERROR(VLOOKUP([.$V9];[$遺業能力番号.$A$1:$遺業能力番号.$B$9];2;0);0)" office:value-type="float" office:value="0" calcext:value-type="float">
            <text:p>0</text:p>
          </table:table-cell>
          <table:table-cell office:value-type="string" calcext:value-type="string">
            <text:p>https://one-draw.jp/ijinden/cardlist/R01/card/R_008.png</text:p>
          </table:table-cell>
          <table:table-cell table:formula="of:=CONCATENATE([$JSON.$A$1];[.$C9];[$JSON.$B$1];[.$E9];[$JSON.$C$1];[.$F9];[$JSON.$D$1];IF(ISNA([.$S9]);&quot;null&quot;;&quot;&quot;&quot;&quot;&amp;[.$S9]&amp;&quot;&quot;&quot;&quot;);[$JSON.$E$1];[.$U9];[$JSON.$F$1];IF(ISNA([.$V9]);&quot;null&quot;;&quot;&quot;&quot;&quot;&amp;[.$V9]&amp;&quot;&quot;&quot;&quot;);[$JSON.$G$1];[.$X9];[$JSON.$H$1];[.$H9];[$JSON.$I$1];[.J9];[$JSON.$J$1];[.$L9];[$JSON.$K$1];[.$O9];[$JSON.$L$1];[.$N9];[$JSON.$M$1];[.$R9];[$JSON.$N$1];[.$T9];[$JSON.$O$1];[.$W9];[$JSON.$P$1];[.$A9];[$JSON.$Q$1];[.$B9];[$JSON.$R$1])" office:value-type="string" office:string-value="{&quot;id&quot;:&quot;R-8&quot;,&quot;name&quot;:&quot;アレクサンドロス大王&quot;,&quot;kana&quot;:&quot;あれくさんどろすだいおう&quot;,&quot;traitText&quot;:null,&quot;ruleText&quot;:&quot;即応¶アタッカーになったとき、アタッカー1体につき相手の戦場のハイケイ1つを破壊する。&quot;,&quot;legacyText&quot;:null,&quot;imageUrl&quot;:&quot;https://one-draw.jp/ijinden/cardlist/R01/card/R_008.png&quot;,&quot;expansion&quot;:10,&quot;rarity&quot;:1,&quot;type&quot;:1,&quot;level&quot;:6,&quot;color&quot;:1,&quot;term&quot;:0,&quot;trait&quot;:0,&quot;legacy&quot;:0,&quot;orderTable&quot;:8,&quot;orderDeck&quot;:181}," calcext:value-type="string">
            <text:p>{"id":"R-8","name":"アレクサンドロス大王","kana":"あれくさんどろすだいおう","traitText":null,"ruleText":"即応¶アタッカーになったとき、アタッカー1体につき相手の戦場のハイケイ1つを破壊する。","legacyText":null,"imageUrl":"https://one-draw.jp/ijinden/cardlist/R01/card/R_008.png","expansion":10,"rarity":1,"type":1,"level":6,"color":1,"term":0,"trait":0,"legacy":0,"orderTable":8,"orderDeck":181},</text:p>
          </table:table-cell>
          <table:table-cell table:number-columns-repeated="16347"/>
        </table:table-row>
        <table:table-row table:style-name="ro2">
          <table:table-cell office:value-type="float" office:value="9" calcext:value-type="float">
            <text:p>9</text:p>
          </table:table-cell>
          <table:table-cell office:value-type="float" office:value="239" calcext:value-type="float">
            <text:p>239</text:p>
          </table:table-cell>
          <table:table-cell office:value-type="string" calcext:value-type="string">
            <text:p>R-9</text:p>
          </table:table-cell>
          <table:table-cell office:value-type="float" office:value="9" calcext:value-type="float">
            <text:p>9</text:p>
          </table:table-cell>
          <table:table-cell office:value-type="string" calcext:value-type="string">
            <text:p>神剣眠る氏社</text:p>
          </table:table-cell>
          <table:table-cell office:value-type="string" calcext:value-type="string">
            <text:p>しんけんねむるうじしゃ</text:p>
          </table:table-cell>
          <table:table-cell office:value-type="string" calcext:value-type="string">
            <text:p>伝説の武将デッキ</text:p>
          </table:table-cell>
          <table:table-cell table:formula="of:=VLOOKUP([.G10];[$収録番号.$A$1:$収録番号.$B$9];2;0)" office:value-type="float" office:value="10" calcext:value-type="float">
            <text:p>10</text:p>
          </table:table-cell>
          <table:table-cell office:value-type="string" calcext:value-type="string">
            <text:p>N</text:p>
          </table:table-cell>
          <table:table-cell table:formula="of:=VLOOKUP([.I10];[$レアリティ番号.$A$1:$レアリティ番号.$B$4];2;0)" office:value-type="float" office:value="1" calcext:value-type="float">
            <text:p>1</text:p>
          </table:table-cell>
          <table:table-cell office:value-type="string" calcext:value-type="string">
            <text:p>ハイケイ</text:p>
          </table:table-cell>
          <table:table-cell table:formula="of:=VLOOKUP([.K10];[$種類番号.$A$1:$種類番号.$B$4];2;0)" office:value-type="float" office:value="2" calcext:value-type="float">
            <text:p>2</text:p>
          </table:table-cell>
          <table:table-cell office:value-type="string" calcext:value-type="string">
            <text:p>赤</text:p>
          </table:table-cell>
          <table:table-cell table:formula="of:=VLOOKUP([.M10];[$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特性番号.$A$1:$特性番号.$B$8];2;0);0)" office:value-type="float" office:value="0" calcext:value-type="float">
            <text:p>0</text:p>
          </table:table-cell>
          <table:table-cell office:value-type="string" calcext:value-type="string">
            <text:p>自分の戦場の赤のイジンが破壊されるたびに発動できる。そのイジン1体を裏にして魔力ゾーンに置く。</text:p>
          </table:table-cell>
          <table:table-cell table:style-name="ce8" office:value-type="string" calcext:value-type="string">
            <text:p>魔力化</text:p>
          </table:table-cell>
          <table:table-cell table:formula="of:=IFERROR(VLOOKUP([.$V10];[$遺業能力番号.$A$1:$遺業能力番号.$B$9];2;0);0)" office:value-type="float" office:value="1" calcext:value-type="float">
            <text:p>1</text:p>
          </table:table-cell>
          <table:table-cell office:value-type="string" calcext:value-type="string">
            <text:p>https://one-draw.jp/ijinden/cardlist/R01/card/R_009.png</text:p>
          </table:table-cell>
          <table:table-cell table:formula="of:=CONCATENATE([$JSON.$A$1];[.$C10];[$JSON.$B$1];[.$E10];[$JSON.$C$1];[.$F10];[$JSON.$D$1];IF(ISNA([.$S10]);&quot;null&quot;;&quot;&quot;&quot;&quot;&amp;[.$S10]&amp;&quot;&quot;&quot;&quot;);[$JSON.$E$1];[.$U10];[$JSON.$F$1];IF(ISNA([.$V10]);&quot;null&quot;;&quot;&quot;&quot;&quot;&amp;[.$V10]&amp;&quot;&quot;&quot;&quot;);[$JSON.$G$1];[.$X10];[$JSON.$H$1];[.$H10];[$JSON.$I$1];[.J10];[$JSON.$J$1];[.$L10];[$JSON.$K$1];[.$O10];[$JSON.$L$1];[.$N10];[$JSON.$M$1];[.$R10];[$JSON.$N$1];[.$T10];[$JSON.$O$1];[.$W10];[$JSON.$P$1];[.$A10];[$JSON.$Q$1];[.$B10];[$JSON.$R$1])" office:value-type="string" office:string-value="{&quot;id&quot;:&quot;R-9&quot;,&quot;name&quot;:&quot;神剣眠る氏社&quot;,&quot;kana&quot;:&quot;しんけんねむるうじしゃ&quot;,&quot;traitText&quot;:null,&quot;ruleText&quot;:&quot;自分の戦場の赤のイジンが破壊されるたびに発動できる。そのイジン1体を裏にして魔力ゾーンに置く。&quot;,&quot;legacyText&quot;:&quot;魔力化&quot;,&quot;imageUrl&quot;:&quot;https://one-draw.jp/ijinden/cardlist/R01/card/R_009.png&quot;,&quot;expansion&quot;:10,&quot;rarity&quot;:1,&quot;type&quot;:2,&quot;level&quot;:2,&quot;color&quot;:1,&quot;term&quot;:0,&quot;trait&quot;:0,&quot;legacy&quot;:1,&quot;orderTable&quot;:9,&quot;orderDeck&quot;:239}," calcext:value-type="string">
            <text:p>{"id":"R-9","name":"神剣眠る氏社","kana":"しんけんねむるうじしゃ","traitText":null,"ruleText":"自分の戦場の赤のイジンが破壊されるたびに発動できる。そのイジン1体を裏にして魔力ゾーンに置く。","legacyText":"魔力化","imageUrl":"https://one-draw.jp/ijinden/cardlist/R01/card/R_009.png","expansion":10,"rarity":1,"type":2,"level":2,"color":1,"term":0,"trait":0,"legacy":1,"orderTable":9,"orderDeck":239},</text:p>
          </table:table-cell>
          <table:table-cell table:number-columns-repeated="16347"/>
        </table:table-row>
        <table:table-row table:style-name="ro2">
          <table:table-cell office:value-type="float" office:value="10" calcext:value-type="float">
            <text:p>10</text:p>
          </table:table-cell>
          <table:table-cell office:value-type="float" office:value="248" calcext:value-type="float">
            <text:p>248</text:p>
          </table:table-cell>
          <table:table-cell office:value-type="string" calcext:value-type="string">
            <text:p>R-10</text:p>
          </table:table-cell>
          <table:table-cell office:value-type="float" office:value="10" calcext:value-type="float">
            <text:p>10</text:p>
          </table:table-cell>
          <table:table-cell office:value-type="string" calcext:value-type="string">
            <text:p>連なる天守閣</text:p>
          </table:table-cell>
          <table:table-cell office:value-type="string" calcext:value-type="string">
            <text:p>つらなるてんしゅかく</text:p>
          </table:table-cell>
          <table:table-cell office:value-type="string" calcext:value-type="string">
            <text:p>伝説の武将デッキ</text:p>
          </table:table-cell>
          <table:table-cell table:formula="of:=VLOOKUP([.G11];[$収録番号.$A$1:$収録番号.$B$9];2;0)" office:value-type="float" office:value="10" calcext:value-type="float">
            <text:p>10</text:p>
          </table:table-cell>
          <table:table-cell office:value-type="string" calcext:value-type="string">
            <text:p>N</text:p>
          </table:table-cell>
          <table:table-cell table:formula="of:=VLOOKUP([.I11];[$レアリティ番号.$A$1:$レアリティ番号.$B$4];2;0)" office:value-type="float" office:value="1" calcext:value-type="float">
            <text:p>1</text:p>
          </table:table-cell>
          <table:table-cell office:value-type="string" calcext:value-type="string">
            <text:p>ハイケイ</text:p>
          </table:table-cell>
          <table:table-cell table:formula="of:=VLOOKUP([.K11];[$種類番号.$A$1:$種類番号.$B$4];2;0)" office:value-type="float" office:value="2" calcext:value-type="float">
            <text:p>2</text:p>
          </table:table-cell>
          <table:table-cell office:value-type="string" calcext:value-type="string">
            <text:p>赤</text:p>
          </table:table-cell>
          <table:table-cell table:formula="of:=VLOOKUP([.M11];[$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特性番号.$A$1:$特性番号.$B$8];2;0);0)" office:value-type="float" office:value="0" calcext:value-type="float">
            <text:p>0</text:p>
          </table:table-cell>
          <table:table-cell office:value-type="string" calcext:value-type="string">
            <text:p>これのハイケイ使用に際し、自分の戦場に「剣術」イジンがいれば、これはレベル1になる。¶これが戦場にある間、自分の戦場のイジンは「パワー+1000」を得る。</text:p>
          </table:table-cell>
          <table:table-cell table:style-name="ce8" office:value-type="string" calcext:value-type="string">
            <text:p>魔力化</text:p>
          </table:table-cell>
          <table:table-cell table:formula="of:=IFERROR(VLOOKUP([.$V11];[$遺業能力番号.$A$1:$遺業能力番号.$B$9];2;0);0)" office:value-type="float" office:value="1" calcext:value-type="float">
            <text:p>1</text:p>
          </table:table-cell>
          <table:table-cell office:value-type="string" calcext:value-type="string">
            <text:p>https://one-draw.jp/ijinden/cardlist/R01/card/R_010.png</text:p>
          </table:table-cell>
          <table:table-cell table:formula="of:=CONCATENATE([$JSON.$A$1];[.$C11];[$JSON.$B$1];[.$E11];[$JSON.$C$1];[.$F11];[$JSON.$D$1];IF(ISNA([.$S11]);&quot;null&quot;;&quot;&quot;&quot;&quot;&amp;[.$S11]&amp;&quot;&quot;&quot;&quot;);[$JSON.$E$1];[.$U11];[$JSON.$F$1];IF(ISNA([.$V11]);&quot;null&quot;;&quot;&quot;&quot;&quot;&amp;[.$V11]&amp;&quot;&quot;&quot;&quot;);[$JSON.$G$1];[.$X11];[$JSON.$H$1];[.$H11];[$JSON.$I$1];[.J11];[$JSON.$J$1];[.$L11];[$JSON.$K$1];[.$O11];[$JSON.$L$1];[.$N11];[$JSON.$M$1];[.$R11];[$JSON.$N$1];[.$T11];[$JSON.$O$1];[.$W11];[$JSON.$P$1];[.$A11];[$JSON.$Q$1];[.$B11];[$JSON.$R$1])" office:value-type="string" office:string-value="{&quot;id&quot;:&quot;R-10&quot;,&quot;name&quot;:&quot;連なる天守閣&quot;,&quot;kana&quot;:&quot;つらなるてんしゅかく&quot;,&quot;traitText&quot;:null,&quot;ruleText&quot;:&quot;これのハイケイ使用に際し、自分の戦場に「剣術」イジンがいれば、これはレベル1になる。¶これが戦場にある間、自分の戦場のイジンは「パワー+1000」を得る。&quot;,&quot;legacyText&quot;:&quot;魔力化&quot;,&quot;imageUrl&quot;:&quot;https://one-draw.jp/ijinden/cardlist/R01/card/R_010.png&quot;,&quot;expansion&quot;:10,&quot;rarity&quot;:1,&quot;type&quot;:2,&quot;level&quot;:3,&quot;color&quot;:1,&quot;term&quot;:0,&quot;trait&quot;:0,&quot;legacy&quot;:1,&quot;orderTable&quot;:10,&quot;orderDeck&quot;:248}," calcext:value-type="string">
            <text:p>{"id":"R-10","name":"連なる天守閣","kana":"つらなるてんしゅかく","traitText":null,"ruleText":"これのハイケイ使用に際し、自分の戦場に「剣術」イジンがいれば、これはレベル1になる。¶これが戦場にある間、自分の戦場のイジンは「パワー+1000」を得る。","legacyText":"魔力化","imageUrl":"https://one-draw.jp/ijinden/cardlist/R01/card/R_010.png","expansion":10,"rarity":1,"type":2,"level":3,"color":1,"term":0,"trait":0,"legacy":1,"orderTable":10,"orderDeck":248},</text:p>
          </table:table-cell>
          <table:table-cell table:number-columns-repeated="16347"/>
        </table:table-row>
        <table:table-row table:style-name="ro2">
          <table:table-cell office:value-type="float" office:value="11" calcext:value-type="float">
            <text:p>11</text:p>
          </table:table-cell>
          <table:table-cell office:value-type="float" office:value="304" calcext:value-type="float">
            <text:p>304</text:p>
          </table:table-cell>
          <table:table-cell office:value-type="string" calcext:value-type="string">
            <text:p>R-11</text:p>
          </table:table-cell>
          <table:table-cell office:value-type="float" office:value="11" calcext:value-type="float">
            <text:p>11</text:p>
          </table:table-cell>
          <table:table-cell office:value-type="string" calcext:value-type="string">
            <text:p>ロイヤリティ</text:p>
          </table:table-cell>
          <table:table-cell office:value-type="string" calcext:value-type="string">
            <text:p>ろいやりてぃ</text:p>
          </table:table-cell>
          <table:table-cell office:value-type="string" calcext:value-type="string">
            <text:p>伝説の武将デッキ</text:p>
          </table:table-cell>
          <table:table-cell table:formula="of:=VLOOKUP([.G12];[$収録番号.$A$1:$収録番号.$B$9];2;0)" office:value-type="float" office:value="10" calcext:value-type="float">
            <text:p>10</text:p>
          </table:table-cell>
          <table:table-cell office:value-type="string" calcext:value-type="string">
            <text:p>N</text:p>
          </table:table-cell>
          <table:table-cell table:formula="of:=VLOOKUP([.I12];[$レアリティ番号.$A$1:$レアリティ番号.$B$4];2;0)" office:value-type="float" office:value="1" calcext:value-type="float">
            <text:p>1</text:p>
          </table:table-cell>
          <table:table-cell office:value-type="string" calcext:value-type="string">
            <text:p>マホウ</text:p>
          </table:table-cell>
          <table:table-cell table:formula="of:=VLOOKUP([.K12];[$種類番号.$A$1:$種類番号.$B$4];2;0)" office:value-type="float" office:value="3" calcext:value-type="float">
            <text:p>3</text:p>
          </table:table-cell>
          <table:table-cell office:value-type="string" calcext:value-type="string">
            <text:p>赤</text:p>
          </table:table-cell>
          <table:table-cell table:formula="of:=VLOOKUP([.M12];[$色番号.$A$1:$色番号.$B$10];2;0)"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特性番号.$A$1:$特性番号.$B$8];2;0);0)" office:value-type="float" office:value="0" calcext:value-type="float">
            <text:p>0</text:p>
          </table:table-cell>
          <table:table-cell office:value-type="string" calcext:value-type="string">
            <text:p>自分の戦場の「剣術」イジン1体を破壊するか、自分の戦場のガーディアン1体を山札の上に戻す。3ドローする。</text:p>
          </table:table-cell>
          <table:table-cell table:style-name="ce8" office:value-type="string" calcext:value-type="string">
            <text:p>冥府発動</text:p>
          </table:table-cell>
          <table:table-cell table:formula="of:=IFERROR(VLOOKUP([.$V12];[$遺業能力番号.$A$1:$遺業能力番号.$B$9];2;0);0)" office:value-type="float" office:value="2" calcext:value-type="float">
            <text:p>2</text:p>
          </table:table-cell>
          <table:table-cell office:value-type="string" calcext:value-type="string">
            <text:p>https://one-draw.jp/ijinden/cardlist/R01/card/R_011.png</text:p>
          </table:table-cell>
          <table:table-cell table:formula="of:=CONCATENATE([$JSON.$A$1];[.$C12];[$JSON.$B$1];[.$E12];[$JSON.$C$1];[.$F12];[$JSON.$D$1];IF(ISNA([.$S12]);&quot;null&quot;;&quot;&quot;&quot;&quot;&amp;[.$S12]&amp;&quot;&quot;&quot;&quot;);[$JSON.$E$1];[.$U12];[$JSON.$F$1];IF(ISNA([.$V12]);&quot;null&quot;;&quot;&quot;&quot;&quot;&amp;[.$V12]&amp;&quot;&quot;&quot;&quot;);[$JSON.$G$1];[.$X12];[$JSON.$H$1];[.$H12];[$JSON.$I$1];[.J12];[$JSON.$J$1];[.$L12];[$JSON.$K$1];[.$O12];[$JSON.$L$1];[.$N12];[$JSON.$M$1];[.$R12];[$JSON.$N$1];[.$T12];[$JSON.$O$1];[.$W12];[$JSON.$P$1];[.$A12];[$JSON.$Q$1];[.$B12];[$JSON.$R$1])" office:value-type="string" office:string-value="{&quot;id&quot;:&quot;R-11&quot;,&quot;name&quot;:&quot;ロイヤリティ&quot;,&quot;kana&quot;:&quot;ろいやりてぃ&quot;,&quot;traitText&quot;:null,&quot;ruleText&quot;:&quot;自分の戦場の「剣術」イジン1体を破壊するか、自分の戦場のガーディアン1体を山札の上に戻す。3ドローする。&quot;,&quot;legacyText&quot;:&quot;冥府発動&quot;,&quot;imageUrl&quot;:&quot;https://one-draw.jp/ijinden/cardlist/R01/card/R_011.png&quot;,&quot;expansion&quot;:10,&quot;rarity&quot;:1,&quot;type&quot;:3,&quot;level&quot;:3,&quot;color&quot;:1,&quot;term&quot;:0,&quot;trait&quot;:0,&quot;legacy&quot;:2,&quot;orderTable&quot;:11,&quot;orderDeck&quot;:304}," calcext:value-type="string">
            <text:p>{"id":"R-11","name":"ロイヤリティ","kana":"ろいやりてぃ","traitText":null,"ruleText":"自分の戦場の「剣術」イジン1体を破壊するか、自分の戦場のガーディアン1体を山札の上に戻す。3ドローする。","legacyText":"冥府発動","imageUrl":"https://one-draw.jp/ijinden/cardlist/R01/card/R_011.png","expansion":10,"rarity":1,"type":3,"level":3,"color":1,"term":0,"trait":0,"legacy":2,"orderTable":11,"orderDeck":304},</text:p>
          </table:table-cell>
          <table:table-cell table:number-columns-repeated="16347"/>
        </table:table-row>
        <table:table-row table:style-name="ro2">
          <table:table-cell office:value-type="float" office:value="12" calcext:value-type="float">
            <text:p>12</text:p>
          </table:table-cell>
          <table:table-cell office:value-type="float" office:value="305" calcext:value-type="float">
            <text:p>305</text:p>
          </table:table-cell>
          <table:table-cell office:value-type="string" calcext:value-type="string">
            <text:p>R-12</text:p>
          </table:table-cell>
          <table:table-cell office:value-type="float" office:value="12" calcext:value-type="float">
            <text:p>12</text:p>
          </table:table-cell>
          <table:table-cell office:value-type="string" calcext:value-type="string">
            <text:p>デスペラード</text:p>
          </table:table-cell>
          <table:table-cell office:value-type="string" calcext:value-type="string">
            <text:p>ですぺらーど</text:p>
          </table:table-cell>
          <table:table-cell office:value-type="string" calcext:value-type="string">
            <text:p>伝説の武将デッキ</text:p>
          </table:table-cell>
          <table:table-cell table:formula="of:=VLOOKUP([.G13];[$収録番号.$A$1:$収録番号.$B$9];2;0)" office:value-type="float" office:value="10" calcext:value-type="float">
            <text:p>10</text:p>
          </table:table-cell>
          <table:table-cell office:value-type="string" calcext:value-type="string">
            <text:p>N</text:p>
          </table:table-cell>
          <table:table-cell table:formula="of:=VLOOKUP([.I13];[$レアリティ番号.$A$1:$レアリティ番号.$B$4];2;0)" office:value-type="float" office:value="1" calcext:value-type="float">
            <text:p>1</text:p>
          </table:table-cell>
          <table:table-cell office:value-type="string" calcext:value-type="string">
            <text:p>マホウ</text:p>
          </table:table-cell>
          <table:table-cell table:formula="of:=VLOOKUP([.K13];[$種類番号.$A$1:$種類番号.$B$4];2;0)" office:value-type="float" office:value="3" calcext:value-type="float">
            <text:p>3</text:p>
          </table:table-cell>
          <table:table-cell office:value-type="string" calcext:value-type="string">
            <text:p>赤</text:p>
          </table:table-cell>
          <table:table-cell table:formula="of:=VLOOKUP([.M13];[$色番号.$A$1:$色番号.$B$10];2;0)"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特性番号.$A$1:$特性番号.$B$8];2;0);0)" office:value-type="float" office:value="0" calcext:value-type="float">
            <text:p>0</text:p>
          </table:table-cell>
          <table:table-cell office:value-type="string" calcext:value-type="string">
            <text:p>自分の戦場のイジン1体と相手の戦場のガーディアン1体を指定して発動できる。そのイジンとガーディアンを破壊する。</text:p>
          </table:table-cell>
          <table:table-cell table:style-name="ce8" office:value-type="string" calcext:value-type="string">
            <text:p>冥府発動</text:p>
          </table:table-cell>
          <table:table-cell table:formula="of:=IFERROR(VLOOKUP([.$V13];[$遺業能力番号.$A$1:$遺業能力番号.$B$9];2;0);0)" office:value-type="float" office:value="2" calcext:value-type="float">
            <text:p>2</text:p>
          </table:table-cell>
          <table:table-cell office:value-type="string" calcext:value-type="string">
            <text:p>https://one-draw.jp/ijinden/cardlist/R01/card/R_012.png</text:p>
          </table:table-cell>
          <table:table-cell table:formula="of:=CONCATENATE([$JSON.$A$1];[.$C13];[$JSON.$B$1];[.$E13];[$JSON.$C$1];[.$F13];[$JSON.$D$1];IF(ISNA([.$S13]);&quot;null&quot;;&quot;&quot;&quot;&quot;&amp;[.$S13]&amp;&quot;&quot;&quot;&quot;);[$JSON.$E$1];[.$U13];[$JSON.$F$1];IF(ISNA([.$V13]);&quot;null&quot;;&quot;&quot;&quot;&quot;&amp;[.$V13]&amp;&quot;&quot;&quot;&quot;);[$JSON.$G$1];[.$X13];[$JSON.$H$1];[.$H13];[$JSON.$I$1];[.J13];[$JSON.$J$1];[.$L13];[$JSON.$K$1];[.$O13];[$JSON.$L$1];[.$N13];[$JSON.$M$1];[.$R13];[$JSON.$N$1];[.$T13];[$JSON.$O$1];[.$W13];[$JSON.$P$1];[.$A13];[$JSON.$Q$1];[.$B13];[$JSON.$R$1])" office:value-type="string" office:string-value="{&quot;id&quot;:&quot;R-12&quot;,&quot;name&quot;:&quot;デスペラード&quot;,&quot;kana&quot;:&quot;ですぺらーど&quot;,&quot;traitText&quot;:null,&quot;ruleText&quot;:&quot;自分の戦場のイジン1体と相手の戦場のガーディアン1体を指定して発動できる。そのイジンとガーディアンを破壊する。&quot;,&quot;legacyText&quot;:&quot;冥府発動&quot;,&quot;imageUrl&quot;:&quot;https://one-draw.jp/ijinden/cardlist/R01/card/R_012.png&quot;,&quot;expansion&quot;:10,&quot;rarity&quot;:1,&quot;type&quot;:3,&quot;level&quot;:3,&quot;color&quot;:1,&quot;term&quot;:0,&quot;trait&quot;:0,&quot;legacy&quot;:2,&quot;orderTable&quot;:12,&quot;orderDeck&quot;:305}," calcext:value-type="string">
            <text:p>{"id":"R-12","name":"デスペラード","kana":"ですぺらーど","traitText":null,"ruleText":"自分の戦場のイジン1体と相手の戦場のガーディアン1体を指定して発動できる。そのイジンとガーディアンを破壊する。","legacyText":"冥府発動","imageUrl":"https://one-draw.jp/ijinden/cardlist/R01/card/R_012.png","expansion":10,"rarity":1,"type":3,"level":3,"color":1,"term":0,"trait":0,"legacy":2,"orderTable":12,"orderDeck":305},</text:p>
          </table:table-cell>
          <table:table-cell table:number-columns-repeated="16347"/>
        </table:table-row>
        <table:table-row table:style-name="ro2">
          <table:table-cell office:value-type="float" office:value="13" calcext:value-type="float">
            <text:p>13</text:p>
          </table:table-cell>
          <table:table-cell office:value-type="float" office:value="343" calcext:value-type="float">
            <text:p>343</text:p>
          </table:table-cell>
          <table:table-cell office:value-type="string" calcext:value-type="string">
            <text:p>R-13</text:p>
          </table:table-cell>
          <table:table-cell office:value-type="float" office:value="13" calcext:value-type="float">
            <text:p>13</text:p>
          </table:table-cell>
          <table:table-cell office:value-type="string" calcext:value-type="string">
            <text:p>レッドストーン</text:p>
          </table:table-cell>
          <table:table-cell office:value-type="string" calcext:value-type="string">
            <text:p>れっどすとーん</text:p>
          </table:table-cell>
          <table:table-cell office:value-type="string" calcext:value-type="string">
            <text:p>伝説の武将デッキ</text:p>
          </table:table-cell>
          <table:table-cell table:formula="of:=VLOOKUP([.G14];[$収録番号.$A$1:$収録番号.$B$9];2;0)" office:value-type="float" office:value="10" calcext:value-type="float">
            <text:p>10</text:p>
          </table:table-cell>
          <table:table-cell office:value-type="string" calcext:value-type="string">
            <text:p>N</text:p>
          </table:table-cell>
          <table:table-cell table:formula="of:=VLOOKUP([.I14];[$レアリティ番号.$A$1:$レアリティ番号.$B$4];2;0)" office:value-type="float" office:value="1" calcext:value-type="float">
            <text:p>1</text:p>
          </table:table-cell>
          <table:table-cell office:value-type="string" calcext:value-type="string">
            <text:p>マリョク</text:p>
          </table:table-cell>
          <table:table-cell table:formula="of:=VLOOKUP([.K14];[$種類番号.$A$1:$種類番号.$B$4];2;0)" office:value-type="float" office:value="4" calcext:value-type="float">
            <text:p>4</text:p>
          </table:table-cell>
          <table:table-cell office:value-type="string" calcext:value-type="string">
            <text:p>赤</text:p>
          </table:table-cell>
          <table:table-cell table:formula="of:=VLOOKUP([.M14];[$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V14];[$遺業能力番号.$A$1:$遺業能力番号.$B$9];2;0);0)" office:value-type="float" office:value="3" calcext:value-type="float">
            <text:p>3</text:p>
          </table:table-cell>
          <table:table-cell office:value-type="string" calcext:value-type="string">
            <text:p>https://one-draw.jp/ijinden/cardlist/R01/card/R_013.png</text:p>
          </table:table-cell>
          <table:table-cell table:formula="of:=CONCATENATE([$JSON.$A$1];[.$C14];[$JSON.$B$1];[.$E14];[$JSON.$C$1];[.$F14];[$JSON.$D$1];IF(ISNA([.$S14]);&quot;null&quot;;&quot;&quot;&quot;&quot;&amp;[.$S14]&amp;&quot;&quot;&quot;&quot;);[$JSON.$E$1];[.$U14];[$JSON.$F$1];IF(ISNA([.$V14]);&quot;null&quot;;&quot;&quot;&quot;&quot;&amp;[.$V14]&amp;&quot;&quot;&quot;&quot;);[$JSON.$G$1];[.$X14];[$JSON.$H$1];[.$H14];[$JSON.$I$1];[.J14];[$JSON.$J$1];[.$L14];[$JSON.$K$1];[.$O14];[$JSON.$L$1];[.$N14];[$JSON.$M$1];[.$R14];[$JSON.$N$1];[.$T14];[$JSON.$O$1];[.$W14];[$JSON.$P$1];[.$A14];[$JSON.$Q$1];[.$B14];[$JSON.$R$1])" office:value-type="string" office:string-value="{&quot;id&quot;:&quot;R-13&quot;,&quot;name&quot;:&quot;レッドストーン&quot;,&quot;kana&quot;:&quot;れっどすとーん&quot;,&quot;traitText&quot;:null,&quot;ruleText&quot;:&quot;※デッキに何枚でも入れてよい。&quot;,&quot;legacyText&quot;:&quot;復元&quot;,&quot;imageUrl&quot;:&quot;https://one-draw.jp/ijinden/cardlist/R01/card/R_013.png&quot;,&quot;expansion&quot;:10,&quot;rarity&quot;:1,&quot;type&quot;:4,&quot;level&quot;:1,&quot;color&quot;:1,&quot;term&quot;:0,&quot;trait&quot;:0,&quot;legacy&quot;:3,&quot;orderTable&quot;:13,&quot;orderDeck&quot;:343}," calcext:value-type="string">
            <text:p>{"id":"R-13","name":"レッドストーン","kana":"れっどすとーん","traitText":null,"ruleText":"※デッキに何枚でも入れてよい。","legacyText":"復元","imageUrl":"https://one-draw.jp/ijinden/cardlist/R01/card/R_013.png","expansion":10,"rarity":1,"type":4,"level":1,"color":1,"term":0,"trait":0,"legacy":3,"orderTable":13,"orderDeck":343},</text:p>
          </table:table-cell>
          <table:table-cell table:number-columns-repeated="16347"/>
        </table:table-row>
        <table:table-row table:style-name="ro2">
          <table:table-cell office:value-type="float" office:value="14" calcext:value-type="float">
            <text:p>14</text:p>
          </table:table-cell>
          <table:table-cell office:value-type="float" office:value="186" calcext:value-type="float">
            <text:p>186</text:p>
          </table:table-cell>
          <table:table-cell office:value-type="string" calcext:value-type="string">
            <text:p>B-1</text:p>
          </table:table-cell>
          <table:table-cell office:value-type="float" office:value="1" calcext:value-type="float">
            <text:p>1</text:p>
          </table:table-cell>
          <table:table-cell office:value-type="string" calcext:value-type="string">
            <text:p>レオナルド・ダ・ヴィンチ</text:p>
          </table:table-cell>
          <table:table-cell office:value-type="string" calcext:value-type="string">
            <text:p>れおなるどだゔぃんち</text:p>
          </table:table-cell>
          <table:table-cell office:value-type="string" calcext:value-type="string">
            <text:p>知と美の革命デッキ</text:p>
          </table:table-cell>
          <table:table-cell table:formula="of:=VLOOKUP([.G15];[$収録番号.$A$1:$収録番号.$B$9];2;0)" office:value-type="float" office:value="11" calcext:value-type="float">
            <text:p>11</text:p>
          </table:table-cell>
          <table:table-cell office:value-type="string" calcext:value-type="string">
            <text:p>SR</text:p>
          </table:table-cell>
          <table:table-cell table:formula="of:=VLOOKUP([.I15];[$レアリティ番号.$A$1:$レアリティ番号.$B$4];2;0)" office:value-type="float" office:value="4" calcext:value-type="float">
            <text:p>4</text:p>
          </table:table-cell>
          <table:table-cell office:value-type="string" calcext:value-type="string">
            <text:p>イジン</text:p>
          </table:table-cell>
          <table:table-cell table:formula="of:=VLOOKUP([.K15];[$種類番号.$A$1:$種類番号.$B$4];2;0)" office:value-type="float" office:value="1" calcext:value-type="float">
            <text:p>1</text:p>
          </table:table-cell>
          <table:table-cell office:value-type="string" calcext:value-type="string">
            <text:p>青</text:p>
          </table:table-cell>
          <table:table-cell table:formula="of:=VLOOKUP([.M15];[$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能力語番号.$A$1:$能力語番号.$B$10];2;0);0)" office:value-type="float" office:value="0" calcext:value-type="float">
            <text:p>0</text:p>
          </table:table-cell>
          <table:table-cell office:value-type="string" calcext:value-type="string">
            <text:p>美術</text:p>
          </table:table-cell>
          <table:table-cell table:formula="of:=IFERROR(VLOOKUP([.$S15];[$特性番号.$A$1:$特性番号.$B$8];2;0);0)" office:value-type="float" office:value="2" calcext:value-type="float">
            <text:p>2</text:p>
          </table:table-cell>
          <table:table-cell office:value-type="string" calcext:value-type="string">
            <text:p>戦場に置かれたとき、自分の墓地のレベル6以下のイジン1体か、自分の墓地のレベル5以下のハイケイ1つを指定して発動できる。そのイジンかハイケイを戦場に置く。</text:p>
          </table:table-cell>
          <table:table-cell table:style-name="ce8" table:formula="of:=NA()" office:value-type="string" office:string-value="" calcext:value-type="error">
            <text:p>#N/A</text:p>
          </table:table-cell>
          <table:table-cell table:formula="of:=IFERROR(VLOOKUP([.$V15];[$遺業能力番号.$A$1:$遺業能力番号.$B$9];2;0);0)" office:value-type="float" office:value="0" calcext:value-type="float">
            <text:p>0</text:p>
          </table:table-cell>
          <table:table-cell office:value-type="string" calcext:value-type="string">
            <text:p>https://one-draw.jp/ijinden/cardlist/B01/card/B_001.png</text:p>
          </table:table-cell>
          <table:table-cell table:formula="of:=CONCATENATE([$JSON.$A$1];[.$C15];[$JSON.$B$1];[.$E15];[$JSON.$C$1];[.$F15];[$JSON.$D$1];IF(ISNA([.$S15]);&quot;null&quot;;&quot;&quot;&quot;&quot;&amp;[.$S15]&amp;&quot;&quot;&quot;&quot;);[$JSON.$E$1];[.$U15];[$JSON.$F$1];IF(ISNA([.$V15]);&quot;null&quot;;&quot;&quot;&quot;&quot;&amp;[.$V15]&amp;&quot;&quot;&quot;&quot;);[$JSON.$G$1];[.$X15];[$JSON.$H$1];[.$H15];[$JSON.$I$1];[.J15];[$JSON.$J$1];[.$L15];[$JSON.$K$1];[.$O15];[$JSON.$L$1];[.$N15];[$JSON.$M$1];[.$R15];[$JSON.$N$1];[.$T15];[$JSON.$O$1];[.$W15];[$JSON.$P$1];[.$A15];[$JSON.$Q$1];[.$B15];[$JSON.$R$1])" office:value-type="string" office:string-value="{&quot;id&quot;:&quot;B-1&quot;,&quot;name&quot;:&quot;レオナルド・ダ・ヴィンチ&quot;,&quot;kana&quot;:&quot;れおなるどだゔぃんち&quot;,&quot;traitText&quot;:&quot;美術&quot;,&quot;ruleText&quot;:&quot;戦場に置かれたとき、自分の墓地のレベル6以下のイジン1体か、自分の墓地のレベル5以下のハイケイ1つを指定して発動できる。そのイジンかハイケイを戦場に置く。&quot;,&quot;legacyText&quot;:null,&quot;imageUrl&quot;:&quot;https://one-draw.jp/ijinden/cardlist/B01/card/B_001.png&quot;,&quot;expansion&quot;:11,&quot;rarity&quot;:4,&quot;type&quot;:1,&quot;level&quot;:6,&quot;color&quot;:2,&quot;term&quot;:0,&quot;trait&quot;:2,&quot;legacy&quot;:0,&quot;orderTable&quot;:14,&quot;orderDeck&quot;:186}," calcext:value-type="string">
            <text:p>{"id":"B-1","name":"レオナルド・ダ・ヴィンチ","kana":"れおなるどだゔぃんち","traitText":"美術","ruleText":"戦場に置かれたとき、自分の墓地のレベル6以下のイジン1体か、自分の墓地のレベル5以下のハイケイ1つを指定して発動できる。そのイジンかハイケイを戦場に置く。","legacyText":null,"imageUrl":"https://one-draw.jp/ijinden/cardlist/B01/card/B_001.png","expansion":11,"rarity":4,"type":1,"level":6,"color":2,"term":0,"trait":2,"legacy":0,"orderTable":14,"orderDeck":186},</text:p>
          </table:table-cell>
          <table:table-cell table:number-columns-repeated="16347"/>
        </table:table-row>
        <table:table-row table:style-name="ro2">
          <table:table-cell office:value-type="float" office:value="15" calcext:value-type="float">
            <text:p>15</text:p>
          </table:table-cell>
          <table:table-cell office:value-type="float" office:value="6" calcext:value-type="float">
            <text:p>6</text:p>
          </table:table-cell>
          <table:table-cell office:value-type="string" calcext:value-type="string">
            <text:p>B-2</text:p>
          </table:table-cell>
          <table:table-cell office:value-type="float" office:value="2" calcext:value-type="float">
            <text:p>2</text:p>
          </table:table-cell>
          <table:table-cell office:value-type="string" calcext:value-type="string">
            <text:p>ヴァスコ・ダ・ガマ</text:p>
          </table:table-cell>
          <table:table-cell office:value-type="string" calcext:value-type="string">
            <text:p>ゔぁすこだがま</text:p>
          </table:table-cell>
          <table:table-cell office:value-type="string" calcext:value-type="string">
            <text:p>知と美の革命デッキ</text:p>
          </table:table-cell>
          <table:table-cell table:formula="of:=VLOOKUP([.G16];[$収録番号.$A$1:$収録番号.$B$9];2;0)" office:value-type="float" office:value="11" calcext:value-type="float">
            <text:p>11</text:p>
          </table:table-cell>
          <table:table-cell office:value-type="string" calcext:value-type="string">
            <text:p>N</text:p>
          </table:table-cell>
          <table:table-cell table:formula="of:=VLOOKUP([.I16];[$レアリティ番号.$A$1:$レアリティ番号.$B$4];2;0)" office:value-type="float" office:value="1" calcext:value-type="float">
            <text:p>1</text:p>
          </table:table-cell>
          <table:table-cell office:value-type="string" calcext:value-type="string">
            <text:p>イジン</text:p>
          </table:table-cell>
          <table:table-cell table:formula="of:=VLOOKUP([.K16];[$種類番号.$A$1:$種類番号.$B$4];2;0)" office:value-type="float" office:value="1" calcext:value-type="float">
            <text:p>1</text:p>
          </table:table-cell>
          <table:table-cell office:value-type="string" calcext:value-type="string">
            <text:p>青</text:p>
          </table:table-cell>
          <table:table-cell table:formula="of:=VLOOKUP([.M16];[$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office:value-type="string" calcext:value-type="string">
            <text:p>航海</text:p>
          </table:table-cell>
          <table:table-cell table:formula="of:=IFERROR(VLOOKUP([.$Q16];[$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16];[$特性番号.$A$1:$特性番号.$B$8];2;0);0)" office:value-type="float" office:value="0" calcext:value-type="float">
            <text:p>0</text:p>
          </table:table-cell>
          <table:table-cell office:value-type="string" calcext:value-type="string">
            <text:p>航海 - アタッカーになったとき、1ドローして、自分の手札1枚を墓地に置く。</text:p>
          </table:table-cell>
          <table:table-cell table:style-name="ce8" office:value-type="string" calcext:value-type="string">
            <text:p>1ドローする</text:p>
          </table:table-cell>
          <table:table-cell table:formula="of:=IFERROR(VLOOKUP([.$V16];[$遺業能力番号.$A$1:$遺業能力番号.$B$9];2;0);0)" office:value-type="float" office:value="4" calcext:value-type="float">
            <text:p>4</text:p>
          </table:table-cell>
          <table:table-cell office:value-type="string" calcext:value-type="string">
            <text:p>https://one-draw.jp/ijinden/cardlist/B01/card/B_002.png</text:p>
          </table:table-cell>
          <table:table-cell table:formula="of:=CONCATENATE([$JSON.$A$1];[.$C16];[$JSON.$B$1];[.$E16];[$JSON.$C$1];[.$F16];[$JSON.$D$1];IF(ISNA([.$S16]);&quot;null&quot;;&quot;&quot;&quot;&quot;&amp;[.$S16]&amp;&quot;&quot;&quot;&quot;);[$JSON.$E$1];[.$U16];[$JSON.$F$1];IF(ISNA([.$V16]);&quot;null&quot;;&quot;&quot;&quot;&quot;&amp;[.$V16]&amp;&quot;&quot;&quot;&quot;);[$JSON.$G$1];[.$X16];[$JSON.$H$1];[.$H16];[$JSON.$I$1];[.J16];[$JSON.$J$1];[.$L16];[$JSON.$K$1];[.$O16];[$JSON.$L$1];[.$N16];[$JSON.$M$1];[.$R16];[$JSON.$N$1];[.$T16];[$JSON.$O$1];[.$W16];[$JSON.$P$1];[.$A16];[$JSON.$Q$1];[.$B16];[$JSON.$R$1])" office:value-type="string" office:string-value="{&quot;id&quot;:&quot;B-2&quot;,&quot;name&quot;:&quot;ヴァスコ・ダ・ガマ&quot;,&quot;kana&quot;:&quot;ゔぁすこだがま&quot;,&quot;traitText&quot;:null,&quot;ruleText&quot;:&quot;航海 - アタッカーになったとき、1ドローして、自分の手札1枚を墓地に置く。&quot;,&quot;legacyText&quot;:&quot;1ドローする&quot;,&quot;imageUrl&quot;:&quot;https://one-draw.jp/ijinden/cardlist/B01/card/B_002.png&quot;,&quot;expansion&quot;:11,&quot;rarity&quot;:1,&quot;type&quot;:1,&quot;level&quot;:1,&quot;color&quot;:2,&quot;term&quot;:1,&quot;trait&quot;:0,&quot;legacy&quot;:4,&quot;orderTable&quot;:15,&quot;orderDeck&quot;:6}," calcext:value-type="string">
            <text:p>{"id":"B-2","name":"ヴァスコ・ダ・ガマ","kana":"ゔぁすこだがま","traitText":null,"ruleText":"航海 - アタッカーになったとき、1ドローして、自分の手札1枚を墓地に置く。","legacyText":"1ドローする","imageUrl":"https://one-draw.jp/ijinden/cardlist/B01/card/B_002.png","expansion":11,"rarity":1,"type":1,"level":1,"color":2,"term":1,"trait":0,"legacy":4,"orderTable":15,"orderDeck":6},</text:p>
          </table:table-cell>
          <table:table-cell table:number-columns-repeated="16347"/>
        </table:table-row>
        <table:table-row table:style-name="ro2">
          <table:table-cell office:value-type="float" office:value="16" calcext:value-type="float">
            <text:p>16</text:p>
          </table:table-cell>
          <table:table-cell office:value-type="float" office:value="32" calcext:value-type="float">
            <text:p>32</text:p>
          </table:table-cell>
          <table:table-cell office:value-type="string" calcext:value-type="string">
            <text:p>B-3</text:p>
          </table:table-cell>
          <table:table-cell office:value-type="float" office:value="3" calcext:value-type="float">
            <text:p>3</text:p>
          </table:table-cell>
          <table:table-cell office:value-type="string" calcext:value-type="string">
            <text:p>好太王</text:p>
          </table:table-cell>
          <table:table-cell office:value-type="string" calcext:value-type="string">
            <text:p>こうたいおう</text:p>
          </table:table-cell>
          <table:table-cell office:value-type="string" calcext:value-type="string">
            <text:p>知と美の革命デッキ</text:p>
          </table:table-cell>
          <table:table-cell table:formula="of:=VLOOKUP([.G17];[$収録番号.$A$1:$収録番号.$B$9];2;0)" office:value-type="float" office:value="11" calcext:value-type="float">
            <text:p>11</text:p>
          </table:table-cell>
          <table:table-cell office:value-type="string" calcext:value-type="string">
            <text:p>N</text:p>
          </table:table-cell>
          <table:table-cell table:formula="of:=VLOOKUP([.I17];[$レアリティ番号.$A$1:$レアリティ番号.$B$4];2;0)" office:value-type="float" office:value="1" calcext:value-type="float">
            <text:p>1</text:p>
          </table:table-cell>
          <table:table-cell office:value-type="string" calcext:value-type="string">
            <text:p>イジン</text:p>
          </table:table-cell>
          <table:table-cell table:formula="of:=VLOOKUP([.K17];[$種類番号.$A$1:$種類番号.$B$4];2;0)" office:value-type="float" office:value="1" calcext:value-type="float">
            <text:p>1</text:p>
          </table:table-cell>
          <table:table-cell office:value-type="string" calcext:value-type="string">
            <text:p>青</text:p>
          </table:table-cell>
          <table:table-cell table:formula="of:=VLOOKUP([.M17];[$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特性番号.$A$1:$特性番号.$B$8];2;0);0)" office:value-type="float" office:value="0" calcext:value-type="float">
            <text:p>0</text:p>
          </table:table-cell>
          <table:table-cell office:value-type="string" calcext:value-type="string">
            <text:p>パワー1000以下のイジンにブロックされない。¶ブロッカーになれない。</text:p>
          </table:table-cell>
          <table:table-cell table:style-name="ce8" office:value-type="string" calcext:value-type="string">
            <text:p>1ドローする</text:p>
          </table:table-cell>
          <table:table-cell table:formula="of:=IFERROR(VLOOKUP([.$V17];[$遺業能力番号.$A$1:$遺業能力番号.$B$9];2;0);0)" office:value-type="float" office:value="4" calcext:value-type="float">
            <text:p>4</text:p>
          </table:table-cell>
          <table:table-cell office:value-type="string" calcext:value-type="string">
            <text:p>https://one-draw.jp/ijinden/cardlist/B01/card/B_003.png</text:p>
          </table:table-cell>
          <table:table-cell table:formula="of:=CONCATENATE([$JSON.$A$1];[.$C17];[$JSON.$B$1];[.$E17];[$JSON.$C$1];[.$F17];[$JSON.$D$1];IF(ISNA([.$S17]);&quot;null&quot;;&quot;&quot;&quot;&quot;&amp;[.$S17]&amp;&quot;&quot;&quot;&quot;);[$JSON.$E$1];[.$U17];[$JSON.$F$1];IF(ISNA([.$V17]);&quot;null&quot;;&quot;&quot;&quot;&quot;&amp;[.$V17]&amp;&quot;&quot;&quot;&quot;);[$JSON.$G$1];[.$X17];[$JSON.$H$1];[.$H17];[$JSON.$I$1];[.J17];[$JSON.$J$1];[.$L17];[$JSON.$K$1];[.$O17];[$JSON.$L$1];[.$N17];[$JSON.$M$1];[.$R17];[$JSON.$N$1];[.$T17];[$JSON.$O$1];[.$W17];[$JSON.$P$1];[.$A17];[$JSON.$Q$1];[.$B17];[$JSON.$R$1])" office:value-type="string" office:string-value="{&quot;id&quot;:&quot;B-3&quot;,&quot;name&quot;:&quot;好太王&quot;,&quot;kana&quot;:&quot;こうたいおう&quot;,&quot;traitText&quot;:null,&quot;ruleText&quot;:&quot;パワー1000以下のイジンにブロックされない。¶ブロッカーになれない。&quot;,&quot;legacyText&quot;:&quot;1ドローする&quot;,&quot;imageUrl&quot;:&quot;https://one-draw.jp/ijinden/cardlist/B01/card/B_003.png&quot;,&quot;expansion&quot;:11,&quot;rarity&quot;:1,&quot;type&quot;:1,&quot;level&quot;:2,&quot;color&quot;:2,&quot;term&quot;:0,&quot;trait&quot;:0,&quot;legacy&quot;:4,&quot;orderTable&quot;:16,&quot;orderDeck&quot;:32}," calcext:value-type="string">
            <text:p>{"id":"B-3","name":"好太王","kana":"こうたいおう","traitText":null,"ruleText":"パワー1000以下のイジンにブロックされない。¶ブロッカーになれない。","legacyText":"1ドローする","imageUrl":"https://one-draw.jp/ijinden/cardlist/B01/card/B_003.png","expansion":11,"rarity":1,"type":1,"level":2,"color":2,"term":0,"trait":0,"legacy":4,"orderTable":16,"orderDeck":32},</text:p>
          </table:table-cell>
          <table:table-cell table:number-columns-repeated="16347"/>
        </table:table-row>
        <table:table-row table:style-name="ro2">
          <table:table-cell office:value-type="float" office:value="17" calcext:value-type="float">
            <text:p>17</text:p>
          </table:table-cell>
          <table:table-cell office:value-type="float" office:value="74" calcext:value-type="float">
            <text:p>74</text:p>
          </table:table-cell>
          <table:table-cell office:value-type="string" calcext:value-type="string">
            <text:p>B-4</text:p>
          </table:table-cell>
          <table:table-cell office:value-type="float" office:value="4" calcext:value-type="float">
            <text:p>4</text:p>
          </table:table-cell>
          <table:table-cell office:value-type="string" calcext:value-type="string">
            <text:p>フェルディナンド・マゼラン</text:p>
          </table:table-cell>
          <table:table-cell office:value-type="string" calcext:value-type="string">
            <text:p>ふぇるでぃなんどまぜらん</text:p>
          </table:table-cell>
          <table:table-cell office:value-type="string" calcext:value-type="string">
            <text:p>知と美の革命デッキ</text:p>
          </table:table-cell>
          <table:table-cell table:formula="of:=VLOOKUP([.G18];[$収録番号.$A$1:$収録番号.$B$9];2;0)" office:value-type="float" office:value="11" calcext:value-type="float">
            <text:p>11</text:p>
          </table:table-cell>
          <table:table-cell office:value-type="string" calcext:value-type="string">
            <text:p>N</text:p>
          </table:table-cell>
          <table:table-cell table:formula="of:=VLOOKUP([.I18];[$レアリティ番号.$A$1:$レアリティ番号.$B$4];2;0)" office:value-type="float" office:value="1" calcext:value-type="float">
            <text:p>1</text:p>
          </table:table-cell>
          <table:table-cell office:value-type="string" calcext:value-type="string">
            <text:p>イジン</text:p>
          </table:table-cell>
          <table:table-cell table:formula="of:=VLOOKUP([.K18];[$種類番号.$A$1:$種類番号.$B$4];2;0)" office:value-type="float" office:value="1" calcext:value-type="float">
            <text:p>1</text:p>
          </table:table-cell>
          <table:table-cell office:value-type="string" calcext:value-type="string">
            <text:p>青</text:p>
          </table:table-cell>
          <table:table-cell table:formula="of:=VLOOKUP([.M18];[$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航海</text:p>
          </table:table-cell>
          <table:table-cell table:formula="of:=IFERROR(VLOOKUP([.$Q18];[$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18];[$特性番号.$A$1:$特性番号.$B$8];2;0);0)" office:value-type="float" office:value="0" calcext:value-type="float">
            <text:p>0</text:p>
          </table:table-cell>
          <table:table-cell office:value-type="string" calcext:value-type="string">
            <text:p>航海 - アタッカーになったとき、相手の手札のカード1つを墓地に置く。そのカードは相手が選ぶ。</text:p>
          </table:table-cell>
          <table:table-cell table:style-name="ce8" table:formula="of:=NA()" office:value-type="string" office:string-value="" calcext:value-type="error">
            <text:p>#N/A</text:p>
          </table:table-cell>
          <table:table-cell table:formula="of:=IFERROR(VLOOKUP([.$V18];[$遺業能力番号.$A$1:$遺業能力番号.$B$9];2;0);0)" office:value-type="float" office:value="0" calcext:value-type="float">
            <text:p>0</text:p>
          </table:table-cell>
          <table:table-cell office:value-type="string" calcext:value-type="string">
            <text:p>https://one-draw.jp/ijinden/cardlist/B01/card/B_004.png</text:p>
          </table:table-cell>
          <table:table-cell table:formula="of:=CONCATENATE([$JSON.$A$1];[.$C18];[$JSON.$B$1];[.$E18];[$JSON.$C$1];[.$F18];[$JSON.$D$1];IF(ISNA([.$S18]);&quot;null&quot;;&quot;&quot;&quot;&quot;&amp;[.$S18]&amp;&quot;&quot;&quot;&quot;);[$JSON.$E$1];[.$U18];[$JSON.$F$1];IF(ISNA([.$V18]);&quot;null&quot;;&quot;&quot;&quot;&quot;&amp;[.$V18]&amp;&quot;&quot;&quot;&quot;);[$JSON.$G$1];[.$X18];[$JSON.$H$1];[.$H18];[$JSON.$I$1];[.J18];[$JSON.$J$1];[.$L18];[$JSON.$K$1];[.$O18];[$JSON.$L$1];[.$N18];[$JSON.$M$1];[.$R18];[$JSON.$N$1];[.$T18];[$JSON.$O$1];[.$W18];[$JSON.$P$1];[.$A18];[$JSON.$Q$1];[.$B18];[$JSON.$R$1])" office:value-type="string" office:string-value="{&quot;id&quot;:&quot;B-4&quot;,&quot;name&quot;:&quot;フェルディナンド・マゼラン&quot;,&quot;kana&quot;:&quot;ふぇるでぃなんどまぜらん&quot;,&quot;traitText&quot;:null,&quot;ruleText&quot;:&quot;航海 - アタッカーになったとき、相手の手札のカード1つを墓地に置く。そのカードは相手が選ぶ。&quot;,&quot;legacyText&quot;:null,&quot;imageUrl&quot;:&quot;https://one-draw.jp/ijinden/cardlist/B01/card/B_004.png&quot;,&quot;expansion&quot;:11,&quot;rarity&quot;:1,&quot;type&quot;:1,&quot;level&quot;:3,&quot;color&quot;:2,&quot;term&quot;:1,&quot;trait&quot;:0,&quot;legacy&quot;:0,&quot;orderTable&quot;:17,&quot;orderDeck&quot;:74}," calcext:value-type="string">
            <text:p>{"id":"B-4","name":"フェルディナンド・マゼラン","kana":"ふぇるでぃなんどまぜらん","traitText":null,"ruleText":"航海 - アタッカーになったとき、相手の手札のカード1つを墓地に置く。そのカードは相手が選ぶ。","legacyText":null,"imageUrl":"https://one-draw.jp/ijinden/cardlist/B01/card/B_004.png","expansion":11,"rarity":1,"type":1,"level":3,"color":2,"term":1,"trait":0,"legacy":0,"orderTable":17,"orderDeck":74},</text:p>
          </table:table-cell>
          <table:table-cell table:number-columns-repeated="16347"/>
        </table:table-row>
        <table:table-row table:style-name="ro2">
          <table:table-cell office:value-type="float" office:value="18" calcext:value-type="float">
            <text:p>18</text:p>
          </table:table-cell>
          <table:table-cell office:value-type="float" office:value="75" calcext:value-type="float">
            <text:p>75</text:p>
          </table:table-cell>
          <table:table-cell office:value-type="string" calcext:value-type="string">
            <text:p>B-5</text:p>
          </table:table-cell>
          <table:table-cell office:value-type="float" office:value="5" calcext:value-type="float">
            <text:p>5</text:p>
          </table:table-cell>
          <table:table-cell office:value-type="string" calcext:value-type="string">
            <text:p>ラファエロ・サンティ</text:p>
          </table:table-cell>
          <table:table-cell office:value-type="string" calcext:value-type="string">
            <text:p>らふぁえろさんてぃ</text:p>
          </table:table-cell>
          <table:table-cell office:value-type="string" calcext:value-type="string">
            <text:p>知と美の革命デッキ</text:p>
          </table:table-cell>
          <table:table-cell table:formula="of:=VLOOKUP([.G19];[$収録番号.$A$1:$収録番号.$B$9];2;0)" office:value-type="float" office:value="11" calcext:value-type="float">
            <text:p>11</text:p>
          </table:table-cell>
          <table:table-cell office:value-type="string" calcext:value-type="string">
            <text:p>N</text:p>
          </table:table-cell>
          <table:table-cell table:formula="of:=VLOOKUP([.I19];[$レアリティ番号.$A$1:$レアリティ番号.$B$4];2;0)" office:value-type="float" office:value="1" calcext:value-type="float">
            <text:p>1</text:p>
          </table:table-cell>
          <table:table-cell office:value-type="string" calcext:value-type="string">
            <text:p>イジン</text:p>
          </table:table-cell>
          <table:table-cell table:formula="of:=VLOOKUP([.K19];[$種類番号.$A$1:$種類番号.$B$4];2;0)" office:value-type="float" office:value="1" calcext:value-type="float">
            <text:p>1</text:p>
          </table:table-cell>
          <table:table-cell office:value-type="string" calcext:value-type="string">
            <text:p>青</text:p>
          </table:table-cell>
          <table:table-cell table:formula="of:=VLOOKUP([.M19];[$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9];[$能力語番号.$A$1:$能力語番号.$B$10];2;0);0)" office:value-type="float" office:value="0" calcext:value-type="float">
            <text:p>0</text:p>
          </table:table-cell>
          <table:table-cell office:value-type="string" calcext:value-type="string">
            <text:p>美術</text:p>
          </table:table-cell>
          <table:table-cell table:formula="of:=IFERROR(VLOOKUP([.$S19];[$特性番号.$A$1:$特性番号.$B$8];2;0);0)" office:value-type="float" office:value="2" calcext:value-type="float">
            <text:p>2</text:p>
          </table:table-cell>
          <table:table-cell office:value-type="string" calcext:value-type="string">
            <text:p>戦場に置かれたとき、自分の墓地のイジン1体かハイケイ1つを手札に戻す。</text:p>
          </table:table-cell>
          <table:table-cell table:style-name="ce8" table:formula="of:=NA()" office:value-type="string" office:string-value="" calcext:value-type="error">
            <text:p>#N/A</text:p>
          </table:table-cell>
          <table:table-cell table:formula="of:=IFERROR(VLOOKUP([.$V19];[$遺業能力番号.$A$1:$遺業能力番号.$B$9];2;0);0)" office:value-type="float" office:value="0" calcext:value-type="float">
            <text:p>0</text:p>
          </table:table-cell>
          <table:table-cell office:value-type="string" calcext:value-type="string">
            <text:p>https://one-draw.jp/ijinden/cardlist/B01/card/B_005.png</text:p>
          </table:table-cell>
          <table:table-cell table:formula="of:=CONCATENATE([$JSON.$A$1];[.$C19];[$JSON.$B$1];[.$E19];[$JSON.$C$1];[.$F19];[$JSON.$D$1];IF(ISNA([.$S19]);&quot;null&quot;;&quot;&quot;&quot;&quot;&amp;[.$S19]&amp;&quot;&quot;&quot;&quot;);[$JSON.$E$1];[.$U19];[$JSON.$F$1];IF(ISNA([.$V19]);&quot;null&quot;;&quot;&quot;&quot;&quot;&amp;[.$V19]&amp;&quot;&quot;&quot;&quot;);[$JSON.$G$1];[.$X19];[$JSON.$H$1];[.$H19];[$JSON.$I$1];[.J19];[$JSON.$J$1];[.$L19];[$JSON.$K$1];[.$O19];[$JSON.$L$1];[.$N19];[$JSON.$M$1];[.$R19];[$JSON.$N$1];[.$T19];[$JSON.$O$1];[.$W19];[$JSON.$P$1];[.$A19];[$JSON.$Q$1];[.$B19];[$JSON.$R$1])" office:value-type="string" office:string-value="{&quot;id&quot;:&quot;B-5&quot;,&quot;name&quot;:&quot;ラファエロ・サンティ&quot;,&quot;kana&quot;:&quot;らふぁえろさんてぃ&quot;,&quot;traitText&quot;:&quot;美術&quot;,&quot;ruleText&quot;:&quot;戦場に置かれたとき、自分の墓地のイジン1体かハイケイ1つを手札に戻す。&quot;,&quot;legacyText&quot;:null,&quot;imageUrl&quot;:&quot;https://one-draw.jp/ijinden/cardlist/B01/card/B_005.png&quot;,&quot;expansion&quot;:11,&quot;rarity&quot;:1,&quot;type&quot;:1,&quot;level&quot;:3,&quot;color&quot;:2,&quot;term&quot;:0,&quot;trait&quot;:2,&quot;legacy&quot;:0,&quot;orderTable&quot;:18,&quot;orderDeck&quot;:75}," calcext:value-type="string">
            <text:p>{"id":"B-5","name":"ラファエロ・サンティ","kana":"らふぁえろさんてぃ","traitText":"美術","ruleText":"戦場に置かれたとき、自分の墓地のイジン1体かハイケイ1つを手札に戻す。","legacyText":null,"imageUrl":"https://one-draw.jp/ijinden/cardlist/B01/card/B_005.png","expansion":11,"rarity":1,"type":1,"level":3,"color":2,"term":0,"trait":2,"legacy":0,"orderTable":18,"orderDeck":75},</text:p>
          </table:table-cell>
          <table:table-cell table:number-columns-repeated="16347"/>
        </table:table-row>
        <table:table-row table:style-name="ro2">
          <table:table-cell office:value-type="float" office:value="19" calcext:value-type="float">
            <text:p>19</text:p>
          </table:table-cell>
          <table:table-cell office:value-type="float" office:value="33" calcext:value-type="float">
            <text:p>33</text:p>
          </table:table-cell>
          <table:table-cell office:value-type="string" calcext:value-type="string">
            <text:p>B-6</text:p>
          </table:table-cell>
          <table:table-cell office:value-type="float" office:value="6" calcext:value-type="float">
            <text:p>6</text:p>
          </table:table-cell>
          <table:table-cell office:value-type="string" calcext:value-type="string">
            <text:p>ジャン・カルヴァン</text:p>
          </table:table-cell>
          <table:table-cell office:value-type="string" calcext:value-type="string">
            <text:p>じゃんかるゔぁん</text:p>
          </table:table-cell>
          <table:table-cell office:value-type="string" calcext:value-type="string">
            <text:p>知と美の革命デッキ</text:p>
          </table:table-cell>
          <table:table-cell table:formula="of:=VLOOKUP([.G20];[$収録番号.$A$1:$収録番号.$B$9];2;0)" office:value-type="float" office:value="11" calcext:value-type="float">
            <text:p>11</text:p>
          </table:table-cell>
          <table:table-cell office:value-type="string" calcext:value-type="string">
            <text:p>N</text:p>
          </table:table-cell>
          <table:table-cell table:formula="of:=VLOOKUP([.I20];[$レアリティ番号.$A$1:$レアリティ番号.$B$4];2;0)" office:value-type="float" office:value="1" calcext:value-type="float">
            <text:p>1</text:p>
          </table:table-cell>
          <table:table-cell office:value-type="string" calcext:value-type="string">
            <text:p>イジン</text:p>
          </table:table-cell>
          <table:table-cell table:formula="of:=VLOOKUP([.K20];[$種類番号.$A$1:$種類番号.$B$4];2;0)" office:value-type="float" office:value="1" calcext:value-type="float">
            <text:p>1</text:p>
          </table:table-cell>
          <table:table-cell office:value-type="string" calcext:value-type="string">
            <text:p>青</text:p>
          </table:table-cell>
          <table:table-cell table:formula="of:=VLOOKUP([.M20];[$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特性番号.$A$1:$特性番号.$B$8];2;0);0)" office:value-type="float" office:value="0" calcext:value-type="float">
            <text:p>0</text:p>
          </table:table-cell>
          <table:table-cell office:value-type="string" calcext:value-type="string">
            <text:p>メインフェイズが開始したとき、自分の魔力ゾーンのマリョク1つを裏にして発動できる。このターンの間「執筆」は発動しない。¶相手のターンの間「パワー+2000」を得る。</text:p>
          </table:table-cell>
          <table:table-cell table:style-name="ce8" office:value-type="string" calcext:value-type="string">
            <text:p>1ドローする</text:p>
          </table:table-cell>
          <table:table-cell table:formula="of:=IFERROR(VLOOKUP([.$V20];[$遺業能力番号.$A$1:$遺業能力番号.$B$9];2;0);0)" office:value-type="float" office:value="4" calcext:value-type="float">
            <text:p>4</text:p>
          </table:table-cell>
          <table:table-cell office:value-type="string" calcext:value-type="string">
            <text:p>https://one-draw.jp/ijinden/cardlist/B01/card/B_006.png</text:p>
          </table:table-cell>
          <table:table-cell table:formula="of:=CONCATENATE([$JSON.$A$1];[.$C20];[$JSON.$B$1];[.$E20];[$JSON.$C$1];[.$F20];[$JSON.$D$1];IF(ISNA([.$S20]);&quot;null&quot;;&quot;&quot;&quot;&quot;&amp;[.$S20]&amp;&quot;&quot;&quot;&quot;);[$JSON.$E$1];[.$U20];[$JSON.$F$1];IF(ISNA([.$V20]);&quot;null&quot;;&quot;&quot;&quot;&quot;&amp;[.$V20]&amp;&quot;&quot;&quot;&quot;);[$JSON.$G$1];[.$X20];[$JSON.$H$1];[.$H20];[$JSON.$I$1];[.J20];[$JSON.$J$1];[.$L20];[$JSON.$K$1];[.$O20];[$JSON.$L$1];[.$N20];[$JSON.$M$1];[.$R20];[$JSON.$N$1];[.$T20];[$JSON.$O$1];[.$W20];[$JSON.$P$1];[.$A20];[$JSON.$Q$1];[.$B20];[$JSON.$R$1])" office:value-type="string" office:string-value="{&quot;id&quot;:&quot;B-6&quot;,&quot;name&quot;:&quot;ジャン・カルヴァン&quot;,&quot;kana&quot;:&quot;じゃんかるゔぁん&quot;,&quot;traitText&quot;:null,&quot;ruleText&quot;:&quot;メインフェイズが開始したとき、自分の魔力ゾーンのマリョク1つを裏にして発動できる。このターンの間「執筆」は発動しない。¶相手のターンの間「パワー+2000」を得る。&quot;,&quot;legacyText&quot;:&quot;1ドローする&quot;,&quot;imageUrl&quot;:&quot;https://one-draw.jp/ijinden/cardlist/B01/card/B_006.png&quot;,&quot;expansion&quot;:11,&quot;rarity&quot;:1,&quot;type&quot;:1,&quot;level&quot;:2,&quot;color&quot;:2,&quot;term&quot;:0,&quot;trait&quot;:0,&quot;legacy&quot;:4,&quot;orderTable&quot;:19,&quot;orderDeck&quot;:33}," calcext:value-type="string">
            <text:p>{"id":"B-6","name":"ジャン・カルヴァン","kana":"じゃんかるゔぁん","traitText":null,"ruleText":"メインフェイズが開始したとき、自分の魔力ゾーンのマリョク1つを裏にして発動できる。このターンの間「執筆」は発動しない。¶相手のターンの間「パワー+2000」を得る。","legacyText":"1ドローする","imageUrl":"https://one-draw.jp/ijinden/cardlist/B01/card/B_006.png","expansion":11,"rarity":1,"type":1,"level":2,"color":2,"term":0,"trait":0,"legacy":4,"orderTable":19,"orderDeck":33},</text:p>
          </table:table-cell>
          <table:table-cell table:number-columns-repeated="16347"/>
        </table:table-row>
        <table:table-row table:style-name="ro2">
          <table:table-cell office:value-type="float" office:value="20" calcext:value-type="float">
            <text:p>20</text:p>
          </table:table-cell>
          <table:table-cell office:value-type="float" office:value="76" calcext:value-type="float">
            <text:p>76</text:p>
          </table:table-cell>
          <table:table-cell office:value-type="string" calcext:value-type="string">
            <text:p>B-7</text:p>
          </table:table-cell>
          <table:table-cell office:value-type="float" office:value="7" calcext:value-type="float">
            <text:p>7</text:p>
          </table:table-cell>
          <table:table-cell office:value-type="string" calcext:value-type="string">
            <text:p>武帝</text:p>
          </table:table-cell>
          <table:table-cell office:value-type="string" calcext:value-type="string">
            <text:p>ぶてい</text:p>
          </table:table-cell>
          <table:table-cell office:value-type="string" calcext:value-type="string">
            <text:p>知と美の革命デッキ</text:p>
          </table:table-cell>
          <table:table-cell table:formula="of:=VLOOKUP([.G21];[$収録番号.$A$1:$収録番号.$B$9];2;0)" office:value-type="float" office:value="11" calcext:value-type="float">
            <text:p>11</text:p>
          </table:table-cell>
          <table:table-cell office:value-type="string" calcext:value-type="string">
            <text:p>N</text:p>
          </table:table-cell>
          <table:table-cell table:formula="of:=VLOOKUP([.I21];[$レアリティ番号.$A$1:$レアリティ番号.$B$4];2;0)" office:value-type="float" office:value="1" calcext:value-type="float">
            <text:p>1</text:p>
          </table:table-cell>
          <table:table-cell office:value-type="string" calcext:value-type="string">
            <text:p>イジン</text:p>
          </table:table-cell>
          <table:table-cell table:formula="of:=VLOOKUP([.K21];[$種類番号.$A$1:$種類番号.$B$4];2;0)" office:value-type="float" office:value="1" calcext:value-type="float">
            <text:p>1</text:p>
          </table:table-cell>
          <table:table-cell office:value-type="string" calcext:value-type="string">
            <text:p>青</text:p>
          </table:table-cell>
          <table:table-cell table:formula="of:=VLOOKUP([.M21];[$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特性番号.$A$1:$特性番号.$B$8];2;0);0)" office:value-type="float" office:value="0" calcext:value-type="float">
            <text:p>0</text:p>
          </table:table-cell>
          <table:table-cell office:value-type="string" calcext:value-type="string">
            <text:p>自分の戦場のイジン1体につき「パワー+1000」を得る。¶パワー5000以上の間「ダブルプレッシャー」を得る。</text:p>
          </table:table-cell>
          <table:table-cell table:style-name="ce8" table:formula="of:=NA()" office:value-type="string" office:string-value="" calcext:value-type="error">
            <text:p>#N/A</text:p>
          </table:table-cell>
          <table:table-cell table:formula="of:=IFERROR(VLOOKUP([.$V21];[$遺業能力番号.$A$1:$遺業能力番号.$B$9];2;0);0)" office:value-type="float" office:value="0" calcext:value-type="float">
            <text:p>0</text:p>
          </table:table-cell>
          <table:table-cell office:value-type="string" calcext:value-type="string">
            <text:p>https://one-draw.jp/ijinden/cardlist/B01/card/B_007.png</text:p>
          </table:table-cell>
          <table:table-cell table:formula="of:=CONCATENATE([$JSON.$A$1];[.$C21];[$JSON.$B$1];[.$E21];[$JSON.$C$1];[.$F21];[$JSON.$D$1];IF(ISNA([.$S21]);&quot;null&quot;;&quot;&quot;&quot;&quot;&amp;[.$S21]&amp;&quot;&quot;&quot;&quot;);[$JSON.$E$1];[.$U21];[$JSON.$F$1];IF(ISNA([.$V21]);&quot;null&quot;;&quot;&quot;&quot;&quot;&amp;[.$V21]&amp;&quot;&quot;&quot;&quot;);[$JSON.$G$1];[.$X21];[$JSON.$H$1];[.$H21];[$JSON.$I$1];[.J21];[$JSON.$J$1];[.$L21];[$JSON.$K$1];[.$O21];[$JSON.$L$1];[.$N21];[$JSON.$M$1];[.$R21];[$JSON.$N$1];[.$T21];[$JSON.$O$1];[.$W21];[$JSON.$P$1];[.$A21];[$JSON.$Q$1];[.$B21];[$JSON.$R$1])" office:value-type="string" office:string-value="{&quot;id&quot;:&quot;B-7&quot;,&quot;name&quot;:&quot;武帝&quot;,&quot;kana&quot;:&quot;ぶてい&quot;,&quot;traitText&quot;:null,&quot;ruleText&quot;:&quot;自分の戦場のイジン1体につき「パワー+1000」を得る。¶パワー5000以上の間「ダブルプレッシャー」を得る。&quot;,&quot;legacyText&quot;:null,&quot;imageUrl&quot;:&quot;https://one-draw.jp/ijinden/cardlist/B01/card/B_007.png&quot;,&quot;expansion&quot;:11,&quot;rarity&quot;:1,&quot;type&quot;:1,&quot;level&quot;:3,&quot;color&quot;:2,&quot;term&quot;:0,&quot;trait&quot;:0,&quot;legacy&quot;:0,&quot;orderTable&quot;:20,&quot;orderDeck&quot;:76}," calcext:value-type="string">
            <text:p>{"id":"B-7","name":"武帝","kana":"ぶてい","traitText":null,"ruleText":"自分の戦場のイジン1体につき「パワー+1000」を得る。¶パワー5000以上の間「ダブルプレッシャー」を得る。","legacyText":null,"imageUrl":"https://one-draw.jp/ijinden/cardlist/B01/card/B_007.png","expansion":11,"rarity":1,"type":1,"level":3,"color":2,"term":0,"trait":0,"legacy":0,"orderTable":20,"orderDeck":76},</text:p>
          </table:table-cell>
          <table:table-cell table:number-columns-repeated="16347"/>
        </table:table-row>
        <table:table-row table:style-name="ro2">
          <table:table-cell office:value-type="float" office:value="21" calcext:value-type="float">
            <text:p>21</text:p>
          </table:table-cell>
          <table:table-cell office:value-type="float" office:value="154" calcext:value-type="float">
            <text:p>154</text:p>
          </table:table-cell>
          <table:table-cell office:value-type="string" calcext:value-type="string">
            <text:p>B-8</text:p>
          </table:table-cell>
          <table:table-cell office:value-type="float" office:value="8" calcext:value-type="float">
            <text:p>8</text:p>
          </table:table-cell>
          <table:table-cell office:value-type="string" calcext:value-type="string">
            <text:p>楊貴妃</text:p>
          </table:table-cell>
          <table:table-cell office:value-type="string" calcext:value-type="string">
            <text:p>ようきひ</text:p>
          </table:table-cell>
          <table:table-cell office:value-type="string" calcext:value-type="string">
            <text:p>知と美の革命デッキ</text:p>
          </table:table-cell>
          <table:table-cell table:formula="of:=VLOOKUP([.G22];[$収録番号.$A$1:$収録番号.$B$9];2;0)" office:value-type="float" office:value="11" calcext:value-type="float">
            <text:p>11</text:p>
          </table:table-cell>
          <table:table-cell office:value-type="string" calcext:value-type="string">
            <text:p>N</text:p>
          </table:table-cell>
          <table:table-cell table:formula="of:=VLOOKUP([.I22];[$レアリティ番号.$A$1:$レアリティ番号.$B$4];2;0)" office:value-type="float" office:value="1" calcext:value-type="float">
            <text:p>1</text:p>
          </table:table-cell>
          <table:table-cell office:value-type="string" calcext:value-type="string">
            <text:p>イジン</text:p>
          </table:table-cell>
          <table:table-cell table:formula="of:=VLOOKUP([.K22];[$種類番号.$A$1:$種類番号.$B$4];2;0)" office:value-type="float" office:value="1" calcext:value-type="float">
            <text:p>1</text:p>
          </table:table-cell>
          <table:table-cell office:value-type="string" calcext:value-type="string">
            <text:p>青</text:p>
          </table:table-cell>
          <table:table-cell table:formula="of:=VLOOKUP([.M22];[$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特性番号.$A$1:$特性番号.$B$8];2;0);0)" office:value-type="float" office:value="0" calcext:value-type="float">
            <text:p>0</text:p>
          </table:table-cell>
          <table:table-cell office:value-type="string" calcext:value-type="string">
            <text:p>戦場に置かれたとき、自分の戦場のイジン1体を破壊して発動できる。3ドローする。¶自分の手札が5枚以上の間「イジンにブロックされない」を得る。</text:p>
          </table:table-cell>
          <table:table-cell table:style-name="ce8" table:formula="of:=NA()" office:value-type="string" office:string-value="" calcext:value-type="error">
            <text:p>#N/A</text:p>
          </table:table-cell>
          <table:table-cell table:formula="of:=IFERROR(VLOOKUP([.$V22];[$遺業能力番号.$A$1:$遺業能力番号.$B$9];2;0);0)" office:value-type="float" office:value="0" calcext:value-type="float">
            <text:p>0</text:p>
          </table:table-cell>
          <table:table-cell office:value-type="string" calcext:value-type="string">
            <text:p>https://one-draw.jp/ijinden/cardlist/B01/card/B_008.png</text:p>
          </table:table-cell>
          <table:table-cell table:formula="of:=CONCATENATE([$JSON.$A$1];[.$C22];[$JSON.$B$1];[.$E22];[$JSON.$C$1];[.$F22];[$JSON.$D$1];IF(ISNA([.$S22]);&quot;null&quot;;&quot;&quot;&quot;&quot;&amp;[.$S22]&amp;&quot;&quot;&quot;&quot;);[$JSON.$E$1];[.$U22];[$JSON.$F$1];IF(ISNA([.$V22]);&quot;null&quot;;&quot;&quot;&quot;&quot;&amp;[.$V22]&amp;&quot;&quot;&quot;&quot;);[$JSON.$G$1];[.$X22];[$JSON.$H$1];[.$H22];[$JSON.$I$1];[.J22];[$JSON.$J$1];[.$L22];[$JSON.$K$1];[.$O22];[$JSON.$L$1];[.$N22];[$JSON.$M$1];[.$R22];[$JSON.$N$1];[.$T22];[$JSON.$O$1];[.$W22];[$JSON.$P$1];[.$A22];[$JSON.$Q$1];[.$B22];[$JSON.$R$1])" office:value-type="string" office:string-value="{&quot;id&quot;:&quot;B-8&quot;,&quot;name&quot;:&quot;楊貴妃&quot;,&quot;kana&quot;:&quot;ようきひ&quot;,&quot;traitText&quot;:null,&quot;ruleText&quot;:&quot;戦場に置かれたとき、自分の戦場のイジン1体を破壊して発動できる。3ドローする。¶自分の手札が5枚以上の間「イジンにブロックされない」を得る。&quot;,&quot;legacyText&quot;:null,&quot;imageUrl&quot;:&quot;https://one-draw.jp/ijinden/cardlist/B01/card/B_008.png&quot;,&quot;expansion&quot;:11,&quot;rarity&quot;:1,&quot;type&quot;:1,&quot;level&quot;:5,&quot;color&quot;:2,&quot;term&quot;:0,&quot;trait&quot;:0,&quot;legacy&quot;:0,&quot;orderTable&quot;:21,&quot;orderDeck&quot;:154}," calcext:value-type="string">
            <text:p>{"id":"B-8","name":"楊貴妃","kana":"ようきひ","traitText":null,"ruleText":"戦場に置かれたとき、自分の戦場のイジン1体を破壊して発動できる。3ドローする。¶自分の手札が5枚以上の間「イジンにブロックされない」を得る。","legacyText":null,"imageUrl":"https://one-draw.jp/ijinden/cardlist/B01/card/B_008.png","expansion":11,"rarity":1,"type":1,"level":5,"color":2,"term":0,"trait":0,"legacy":0,"orderTable":21,"orderDeck":154},</text:p>
          </table:table-cell>
          <table:table-cell table:number-columns-repeated="16347"/>
        </table:table-row>
        <table:table-row table:style-name="ro2">
          <table:table-cell office:value-type="float" office:value="22" calcext:value-type="float">
            <text:p>22</text:p>
          </table:table-cell>
          <table:table-cell office:value-type="float" office:value="242" calcext:value-type="float">
            <text:p>242</text:p>
          </table:table-cell>
          <table:table-cell office:value-type="string" calcext:value-type="string">
            <text:p>B-9</text:p>
          </table:table-cell>
          <table:table-cell office:value-type="float" office:value="9" calcext:value-type="float">
            <text:p>9</text:p>
          </table:table-cell>
          <table:table-cell office:value-type="string" calcext:value-type="string">
            <text:p>モナ・リザ</text:p>
          </table:table-cell>
          <table:table-cell office:value-type="string" calcext:value-type="string">
            <text:p>もなりざ</text:p>
          </table:table-cell>
          <table:table-cell office:value-type="string" calcext:value-type="string">
            <text:p>知と美の革命デッキ</text:p>
          </table:table-cell>
          <table:table-cell table:formula="of:=VLOOKUP([.G23];[$収録番号.$A$1:$収録番号.$B$9];2;0)" office:value-type="float" office:value="11" calcext:value-type="float">
            <text:p>11</text:p>
          </table:table-cell>
          <table:table-cell office:value-type="string" calcext:value-type="string">
            <text:p>N</text:p>
          </table:table-cell>
          <table:table-cell table:formula="of:=VLOOKUP([.I23];[$レアリティ番号.$A$1:$レアリティ番号.$B$4];2;0)" office:value-type="float" office:value="1" calcext:value-type="float">
            <text:p>1</text:p>
          </table:table-cell>
          <table:table-cell office:value-type="string" calcext:value-type="string">
            <text:p>ハイケイ</text:p>
          </table:table-cell>
          <table:table-cell table:formula="of:=VLOOKUP([.K23];[$種類番号.$A$1:$種類番号.$B$4];2;0)" office:value-type="float" office:value="2" calcext:value-type="float">
            <text:p>2</text:p>
          </table:table-cell>
          <table:table-cell office:value-type="string" calcext:value-type="string">
            <text:p>青</text:p>
          </table:table-cell>
          <table:table-cell table:formula="of:=VLOOKUP([.M23];[$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能力語番号.$A$1:$能力語番号.$B$10];2;0);0)" office:value-type="float" office:value="0" calcext:value-type="float">
            <text:p>0</text:p>
          </table:table-cell>
          <table:table-cell office:value-type="string" calcext:value-type="string">
            <text:p>美術</text:p>
          </table:table-cell>
          <table:table-cell table:formula="of:=IFERROR(VLOOKUP([.$S23];[$特性番号.$A$1:$特性番号.$B$8];2;0);0)" office:value-type="float" office:value="2" calcext:value-type="float">
            <text:p>2</text:p>
          </table:table-cell>
          <table:table-cell office:value-type="string" calcext:value-type="string">
            <text:p>自分のメインフェイズが開始したとき、手札の「美術」カード1つを墓地に置いて発動できる。1ドローする。</text:p>
          </table:table-cell>
          <table:table-cell table:style-name="ce8" office:value-type="string" calcext:value-type="string">
            <text:p>手札に戻す</text:p>
          </table:table-cell>
          <table:table-cell table:formula="of:=IFERROR(VLOOKUP([.$V23];[$遺業能力番号.$A$1:$遺業能力番号.$B$9];2;0);0)" office:value-type="float" office:value="5" calcext:value-type="float">
            <text:p>5</text:p>
          </table:table-cell>
          <table:table-cell office:value-type="string" calcext:value-type="string">
            <text:p>https://one-draw.jp/ijinden/cardlist/B01/card/B_009.png</text:p>
          </table:table-cell>
          <table:table-cell table:formula="of:=CONCATENATE([$JSON.$A$1];[.$C23];[$JSON.$B$1];[.$E23];[$JSON.$C$1];[.$F23];[$JSON.$D$1];IF(ISNA([.$S23]);&quot;null&quot;;&quot;&quot;&quot;&quot;&amp;[.$S23]&amp;&quot;&quot;&quot;&quot;);[$JSON.$E$1];[.$U23];[$JSON.$F$1];IF(ISNA([.$V23]);&quot;null&quot;;&quot;&quot;&quot;&quot;&amp;[.$V23]&amp;&quot;&quot;&quot;&quot;);[$JSON.$G$1];[.$X23];[$JSON.$H$1];[.$H23];[$JSON.$I$1];[.J23];[$JSON.$J$1];[.$L23];[$JSON.$K$1];[.$O23];[$JSON.$L$1];[.$N23];[$JSON.$M$1];[.$R23];[$JSON.$N$1];[.$T23];[$JSON.$O$1];[.$W23];[$JSON.$P$1];[.$A23];[$JSON.$Q$1];[.$B23];[$JSON.$R$1])" office:value-type="string" office:string-value="{&quot;id&quot;:&quot;B-9&quot;,&quot;name&quot;:&quot;モナ・リザ&quot;,&quot;kana&quot;:&quot;もなりざ&quot;,&quot;traitText&quot;:&quot;美術&quot;,&quot;ruleText&quot;:&quot;自分のメインフェイズが開始したとき、手札の「美術」カード1つを墓地に置いて発動できる。1ドローする。&quot;,&quot;legacyText&quot;:&quot;手札に戻す&quot;,&quot;imageUrl&quot;:&quot;https://one-draw.jp/ijinden/cardlist/B01/card/B_009.png&quot;,&quot;expansion&quot;:11,&quot;rarity&quot;:1,&quot;type&quot;:2,&quot;level&quot;:2,&quot;color&quot;:2,&quot;term&quot;:0,&quot;trait&quot;:2,&quot;legacy&quot;:5,&quot;orderTable&quot;:22,&quot;orderDeck&quot;:242}," calcext:value-type="string">
            <text:p>{"id":"B-9","name":"モナ・リザ","kana":"もなりざ","traitText":"美術","ruleText":"自分のメインフェイズが開始したとき、手札の「美術」カード1つを墓地に置いて発動できる。1ドローする。","legacyText":"手札に戻す","imageUrl":"https://one-draw.jp/ijinden/cardlist/B01/card/B_009.png","expansion":11,"rarity":1,"type":2,"level":2,"color":2,"term":0,"trait":2,"legacy":5,"orderTable":22,"orderDeck":242},</text:p>
          </table:table-cell>
          <table:table-cell table:number-columns-repeated="16347"/>
        </table:table-row>
        <table:table-row table:style-name="ro2">
          <table:table-cell office:value-type="float" office:value="23" calcext:value-type="float">
            <text:p>23</text:p>
          </table:table-cell>
          <table:table-cell office:value-type="float" office:value="251" calcext:value-type="float">
            <text:p>251</text:p>
          </table:table-cell>
          <table:table-cell office:value-type="string" calcext:value-type="string">
            <text:p>B-10</text:p>
          </table:table-cell>
          <table:table-cell office:value-type="float" office:value="10" calcext:value-type="float">
            <text:p>10</text:p>
          </table:table-cell>
          <table:table-cell office:value-type="string" calcext:value-type="string">
            <text:p>革命の広場</text:p>
          </table:table-cell>
          <table:table-cell office:value-type="string" calcext:value-type="string">
            <text:p>かくめいのひろば</text:p>
          </table:table-cell>
          <table:table-cell office:value-type="string" calcext:value-type="string">
            <text:p>知と美の革命デッキ</text:p>
          </table:table-cell>
          <table:table-cell table:formula="of:=VLOOKUP([.G24];[$収録番号.$A$1:$収録番号.$B$9];2;0)" office:value-type="float" office:value="11" calcext:value-type="float">
            <text:p>11</text:p>
          </table:table-cell>
          <table:table-cell office:value-type="string" calcext:value-type="string">
            <text:p>N</text:p>
          </table:table-cell>
          <table:table-cell table:formula="of:=VLOOKUP([.I24];[$レアリティ番号.$A$1:$レアリティ番号.$B$4];2;0)" office:value-type="float" office:value="1" calcext:value-type="float">
            <text:p>1</text:p>
          </table:table-cell>
          <table:table-cell office:value-type="string" calcext:value-type="string">
            <text:p>ハイケイ</text:p>
          </table:table-cell>
          <table:table-cell table:formula="of:=VLOOKUP([.K24];[$種類番号.$A$1:$種類番号.$B$4];2;0)" office:value-type="float" office:value="2" calcext:value-type="float">
            <text:p>2</text:p>
          </table:table-cell>
          <table:table-cell office:value-type="string" calcext:value-type="string">
            <text:p>青</text:p>
          </table:table-cell>
          <table:table-cell table:formula="of:=VLOOKUP([.M24];[$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特性番号.$A$1:$特性番号.$B$8];2;0);0)" office:value-type="float" office:value="0" calcext:value-type="float">
            <text:p>0</text:p>
          </table:table-cell>
          <table:table-cell office:value-type="string" calcext:value-type="string">
            <text:p>イジンが破壊されるたび、1ドローする。¶自分のメインフェイズが開始したとき、自分の戦場のイジン1体を指定して発動できる。そのイジンを破壊する。</text:p>
          </table:table-cell>
          <table:table-cell table:style-name="ce8" office:value-type="string" calcext:value-type="string">
            <text:p>手札に戻す</text:p>
          </table:table-cell>
          <table:table-cell table:formula="of:=IFERROR(VLOOKUP([.$V24];[$遺業能力番号.$A$1:$遺業能力番号.$B$9];2;0);0)" office:value-type="float" office:value="5" calcext:value-type="float">
            <text:p>5</text:p>
          </table:table-cell>
          <table:table-cell office:value-type="string" calcext:value-type="string">
            <text:p>https://one-draw.jp/ijinden/cardlist/B01/card/B_010.png</text:p>
          </table:table-cell>
          <table:table-cell table:formula="of:=CONCATENATE([$JSON.$A$1];[.$C24];[$JSON.$B$1];[.$E24];[$JSON.$C$1];[.$F24];[$JSON.$D$1];IF(ISNA([.$S24]);&quot;null&quot;;&quot;&quot;&quot;&quot;&amp;[.$S24]&amp;&quot;&quot;&quot;&quot;);[$JSON.$E$1];[.$U24];[$JSON.$F$1];IF(ISNA([.$V24]);&quot;null&quot;;&quot;&quot;&quot;&quot;&amp;[.$V24]&amp;&quot;&quot;&quot;&quot;);[$JSON.$G$1];[.$X24];[$JSON.$H$1];[.$H24];[$JSON.$I$1];[.J24];[$JSON.$J$1];[.$L24];[$JSON.$K$1];[.$O24];[$JSON.$L$1];[.$N24];[$JSON.$M$1];[.$R24];[$JSON.$N$1];[.$T24];[$JSON.$O$1];[.$W24];[$JSON.$P$1];[.$A24];[$JSON.$Q$1];[.$B24];[$JSON.$R$1])" office:value-type="string" office:string-value="{&quot;id&quot;:&quot;B-10&quot;,&quot;name&quot;:&quot;革命の広場&quot;,&quot;kana&quot;:&quot;かくめいのひろば&quot;,&quot;traitText&quot;:null,&quot;ruleText&quot;:&quot;イジンが破壊されるたび、1ドローする。¶自分のメインフェイズが開始したとき、自分の戦場のイジン1体を指定して発動できる。そのイジンを破壊する。&quot;,&quot;legacyText&quot;:&quot;手札に戻す&quot;,&quot;imageUrl&quot;:&quot;https://one-draw.jp/ijinden/cardlist/B01/card/B_010.png&quot;,&quot;expansion&quot;:11,&quot;rarity&quot;:1,&quot;type&quot;:2,&quot;level&quot;:3,&quot;color&quot;:2,&quot;term&quot;:0,&quot;trait&quot;:0,&quot;legacy&quot;:5,&quot;orderTable&quot;:23,&quot;orderDeck&quot;:251}," calcext:value-type="string">
            <text:p>{"id":"B-10","name":"革命の広場","kana":"かくめいのひろば","traitText":null,"ruleText":"イジンが破壊されるたび、1ドローする。¶自分のメインフェイズが開始したとき、自分の戦場のイジン1体を指定して発動できる。そのイジンを破壊する。","legacyText":"手札に戻す","imageUrl":"https://one-draw.jp/ijinden/cardlist/B01/card/B_010.png","expansion":11,"rarity":1,"type":2,"level":3,"color":2,"term":0,"trait":0,"legacy":5,"orderTable":23,"orderDeck":251},</text:p>
          </table:table-cell>
          <table:table-cell table:number-columns-repeated="16347"/>
        </table:table-row>
        <table:table-row table:style-name="ro2">
          <table:table-cell office:value-type="float" office:value="24" calcext:value-type="float">
            <text:p>24</text:p>
          </table:table-cell>
          <table:table-cell office:value-type="float" office:value="307" calcext:value-type="float">
            <text:p>307</text:p>
          </table:table-cell>
          <table:table-cell office:value-type="string" calcext:value-type="string">
            <text:p>B-11</text:p>
          </table:table-cell>
          <table:table-cell office:value-type="float" office:value="11" calcext:value-type="float">
            <text:p>11</text:p>
          </table:table-cell>
          <table:table-cell office:value-type="string" calcext:value-type="string">
            <text:p>フリート</text:p>
          </table:table-cell>
          <table:table-cell office:value-type="string" calcext:value-type="string">
            <text:p>ふりーと</text:p>
          </table:table-cell>
          <table:table-cell office:value-type="string" calcext:value-type="string">
            <text:p>知と美の革命デッキ</text:p>
          </table:table-cell>
          <table:table-cell table:formula="of:=VLOOKUP([.G25];[$収録番号.$A$1:$収録番号.$B$9];2;0)" office:value-type="float" office:value="11" calcext:value-type="float">
            <text:p>11</text:p>
          </table:table-cell>
          <table:table-cell office:value-type="string" calcext:value-type="string">
            <text:p>N</text:p>
          </table:table-cell>
          <table:table-cell table:formula="of:=VLOOKUP([.I25];[$レアリティ番号.$A$1:$レアリティ番号.$B$4];2;0)" office:value-type="float" office:value="1" calcext:value-type="float">
            <text:p>1</text:p>
          </table:table-cell>
          <table:table-cell office:value-type="string" calcext:value-type="string">
            <text:p>マホウ</text:p>
          </table:table-cell>
          <table:table-cell table:formula="of:=VLOOKUP([.K25];[$種類番号.$A$1:$種類番号.$B$4];2;0)" office:value-type="float" office:value="3" calcext:value-type="float">
            <text:p>3</text:p>
          </table:table-cell>
          <table:table-cell office:value-type="string" calcext:value-type="string">
            <text:p>青</text:p>
          </table:table-cell>
          <table:table-cell table:formula="of:=VLOOKUP([.M25];[$色番号.$A$1:$色番号.$B$10];2;0)"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2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5];[$特性番号.$A$1:$特性番号.$B$8];2;0);0)" office:value-type="float" office:value="0" calcext:value-type="float">
            <text:p>0</text:p>
          </table:table-cell>
          <table:table-cell office:value-type="string" calcext:value-type="string">
            <text:p>このターンのバトル解決に際し、アタッカーは破壊されない。¶このターンの間「航海」を持つ戦場のイジンは「アタック+2000」を得る。</text:p>
          </table:table-cell>
          <table:table-cell table:style-name="ce8" table:formula="of:=NA()" office:value-type="string" office:string-value="" calcext:value-type="error">
            <text:p>#N/A</text:p>
          </table:table-cell>
          <table:table-cell table:formula="of:=IFERROR(VLOOKUP([.$V25];[$遺業能力番号.$A$1:$遺業能力番号.$B$9];2;0);0)" office:value-type="float" office:value="0" calcext:value-type="float">
            <text:p>0</text:p>
          </table:table-cell>
          <table:table-cell office:value-type="string" calcext:value-type="string">
            <text:p>https://one-draw.jp/ijinden/cardlist/B01/card/B_011.png</text:p>
          </table:table-cell>
          <table:table-cell table:formula="of:=CONCATENATE([$JSON.$A$1];[.$C25];[$JSON.$B$1];[.$E25];[$JSON.$C$1];[.$F25];[$JSON.$D$1];IF(ISNA([.$S25]);&quot;null&quot;;&quot;&quot;&quot;&quot;&amp;[.$S25]&amp;&quot;&quot;&quot;&quot;);[$JSON.$E$1];[.$U25];[$JSON.$F$1];IF(ISNA([.$V25]);&quot;null&quot;;&quot;&quot;&quot;&quot;&amp;[.$V25]&amp;&quot;&quot;&quot;&quot;);[$JSON.$G$1];[.$X25];[$JSON.$H$1];[.$H25];[$JSON.$I$1];[.J25];[$JSON.$J$1];[.$L25];[$JSON.$K$1];[.$O25];[$JSON.$L$1];[.$N25];[$JSON.$M$1];[.$R25];[$JSON.$N$1];[.$T25];[$JSON.$O$1];[.$W25];[$JSON.$P$1];[.$A25];[$JSON.$Q$1];[.$B25];[$JSON.$R$1])" office:value-type="string" office:string-value="{&quot;id&quot;:&quot;B-11&quot;,&quot;name&quot;:&quot;フリート&quot;,&quot;kana&quot;:&quot;ふりーと&quot;,&quot;traitText&quot;:null,&quot;ruleText&quot;:&quot;このターンのバトル解決に際し、アタッカーは破壊されない。¶このターンの間「航海」を持つ戦場のイジンは「アタック+2000」を得る。&quot;,&quot;legacyText&quot;:null,&quot;imageUrl&quot;:&quot;https://one-draw.jp/ijinden/cardlist/B01/card/B_011.png&quot;,&quot;expansion&quot;:11,&quot;rarity&quot;:1,&quot;type&quot;:3,&quot;level&quot;:3,&quot;color&quot;:2,&quot;term&quot;:0,&quot;trait&quot;:0,&quot;legacy&quot;:0,&quot;orderTable&quot;:24,&quot;orderDeck&quot;:307}," calcext:value-type="string">
            <text:p>{"id":"B-11","name":"フリート","kana":"ふりーと","traitText":null,"ruleText":"このターンのバトル解決に際し、アタッカーは破壊されない。¶このターンの間「航海」を持つ戦場のイジンは「アタック+2000」を得る。","legacyText":null,"imageUrl":"https://one-draw.jp/ijinden/cardlist/B01/card/B_011.png","expansion":11,"rarity":1,"type":3,"level":3,"color":2,"term":0,"trait":0,"legacy":0,"orderTable":24,"orderDeck":307},</text:p>
          </table:table-cell>
          <table:table-cell table:number-columns-repeated="16347"/>
        </table:table-row>
        <table:table-row table:style-name="ro2">
          <table:table-cell office:value-type="float" office:value="25" calcext:value-type="float">
            <text:p>25</text:p>
          </table:table-cell>
          <table:table-cell office:value-type="float" office:value="308" calcext:value-type="float">
            <text:p>308</text:p>
          </table:table-cell>
          <table:table-cell office:value-type="string" calcext:value-type="string">
            <text:p>B-12</text:p>
          </table:table-cell>
          <table:table-cell office:value-type="float" office:value="12" calcext:value-type="float">
            <text:p>12</text:p>
          </table:table-cell>
          <table:table-cell office:value-type="string" calcext:value-type="string">
            <text:p>ドローイング</text:p>
          </table:table-cell>
          <table:table-cell office:value-type="string" calcext:value-type="string">
            <text:p>どろーいんぐ</text:p>
          </table:table-cell>
          <table:table-cell office:value-type="string" calcext:value-type="string">
            <text:p>知と美の革命デッキ</text:p>
          </table:table-cell>
          <table:table-cell table:formula="of:=VLOOKUP([.G26];[$収録番号.$A$1:$収録番号.$B$9];2;0)" office:value-type="float" office:value="11" calcext:value-type="float">
            <text:p>11</text:p>
          </table:table-cell>
          <table:table-cell office:value-type="string" calcext:value-type="string">
            <text:p>N</text:p>
          </table:table-cell>
          <table:table-cell table:formula="of:=VLOOKUP([.I26];[$レアリティ番号.$A$1:$レアリティ番号.$B$4];2;0)" office:value-type="float" office:value="1" calcext:value-type="float">
            <text:p>1</text:p>
          </table:table-cell>
          <table:table-cell office:value-type="string" calcext:value-type="string">
            <text:p>マホウ</text:p>
          </table:table-cell>
          <table:table-cell table:formula="of:=VLOOKUP([.K26];[$種類番号.$A$1:$種類番号.$B$4];2;0)" office:value-type="float" office:value="3" calcext:value-type="float">
            <text:p>3</text:p>
          </table:table-cell>
          <table:table-cell office:value-type="string" calcext:value-type="string">
            <text:p>青</text:p>
          </table:table-cell>
          <table:table-cell table:formula="of:=VLOOKUP([.M26];[$色番号.$A$1:$色番号.$B$10];2;0)"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6];[$特性番号.$A$1:$特性番号.$B$8];2;0);0)" office:value-type="float" office:value="0" calcext:value-type="float">
            <text:p>0</text:p>
          </table:table-cell>
          <table:table-cell office:value-type="string" calcext:value-type="string">
            <text:p>2ドローする。</text:p>
          </table:table-cell>
          <table:table-cell table:style-name="ce8" office:value-type="string" calcext:value-type="string">
            <text:p>冥府発動</text:p>
          </table:table-cell>
          <table:table-cell table:formula="of:=IFERROR(VLOOKUP([.$V26];[$遺業能力番号.$A$1:$遺業能力番号.$B$9];2;0);0)" office:value-type="float" office:value="2" calcext:value-type="float">
            <text:p>2</text:p>
          </table:table-cell>
          <table:table-cell office:value-type="string" calcext:value-type="string">
            <text:p>https://one-draw.jp/ijinden/cardlist/B01/card/B_012.png</text:p>
          </table:table-cell>
          <table:table-cell table:formula="of:=CONCATENATE([$JSON.$A$1];[.$C26];[$JSON.$B$1];[.$E26];[$JSON.$C$1];[.$F26];[$JSON.$D$1];IF(ISNA([.$S26]);&quot;null&quot;;&quot;&quot;&quot;&quot;&amp;[.$S26]&amp;&quot;&quot;&quot;&quot;);[$JSON.$E$1];[.$U26];[$JSON.$F$1];IF(ISNA([.$V26]);&quot;null&quot;;&quot;&quot;&quot;&quot;&amp;[.$V26]&amp;&quot;&quot;&quot;&quot;);[$JSON.$G$1];[.$X26];[$JSON.$H$1];[.$H26];[$JSON.$I$1];[.J26];[$JSON.$J$1];[.$L26];[$JSON.$K$1];[.$O26];[$JSON.$L$1];[.$N26];[$JSON.$M$1];[.$R26];[$JSON.$N$1];[.$T26];[$JSON.$O$1];[.$W26];[$JSON.$P$1];[.$A26];[$JSON.$Q$1];[.$B26];[$JSON.$R$1])" office:value-type="string" office:string-value="{&quot;id&quot;:&quot;B-12&quot;,&quot;name&quot;:&quot;ドローイング&quot;,&quot;kana&quot;:&quot;どろーいんぐ&quot;,&quot;traitText&quot;:null,&quot;ruleText&quot;:&quot;2ドローする。&quot;,&quot;legacyText&quot;:&quot;冥府発動&quot;,&quot;imageUrl&quot;:&quot;https://one-draw.jp/ijinden/cardlist/B01/card/B_012.png&quot;,&quot;expansion&quot;:11,&quot;rarity&quot;:1,&quot;type&quot;:3,&quot;level&quot;:3,&quot;color&quot;:2,&quot;term&quot;:0,&quot;trait&quot;:0,&quot;legacy&quot;:2,&quot;orderTable&quot;:25,&quot;orderDeck&quot;:308}," calcext:value-type="string">
            <text:p>{"id":"B-12","name":"ドローイング","kana":"どろーいんぐ","traitText":null,"ruleText":"2ドローする。","legacyText":"冥府発動","imageUrl":"https://one-draw.jp/ijinden/cardlist/B01/card/B_012.png","expansion":11,"rarity":1,"type":3,"level":3,"color":2,"term":0,"trait":0,"legacy":2,"orderTable":25,"orderDeck":308},</text:p>
          </table:table-cell>
          <table:table-cell table:number-columns-repeated="16347"/>
        </table:table-row>
        <table:table-row table:style-name="ro2">
          <table:table-cell office:value-type="float" office:value="26" calcext:value-type="float">
            <text:p>26</text:p>
          </table:table-cell>
          <table:table-cell office:value-type="float" office:value="349" calcext:value-type="float">
            <text:p>349</text:p>
          </table:table-cell>
          <table:table-cell office:value-type="string" calcext:value-type="string">
            <text:p>B-13</text:p>
          </table:table-cell>
          <table:table-cell office:value-type="float" office:value="13" calcext:value-type="float">
            <text:p>13</text:p>
          </table:table-cell>
          <table:table-cell office:value-type="string" calcext:value-type="string">
            <text:p>ブルーストーン</text:p>
          </table:table-cell>
          <table:table-cell office:value-type="string" calcext:value-type="string">
            <text:p>ぶるーすとーん</text:p>
          </table:table-cell>
          <table:table-cell office:value-type="string" calcext:value-type="string">
            <text:p>知と美の革命デッキ</text:p>
          </table:table-cell>
          <table:table-cell table:formula="of:=VLOOKUP([.G27];[$収録番号.$A$1:$収録番号.$B$9];2;0)" office:value-type="float" office:value="11" calcext:value-type="float">
            <text:p>11</text:p>
          </table:table-cell>
          <table:table-cell office:value-type="string" calcext:value-type="string">
            <text:p>N</text:p>
          </table:table-cell>
          <table:table-cell table:formula="of:=VLOOKUP([.I27];[$レアリティ番号.$A$1:$レアリティ番号.$B$4];2;0)" office:value-type="float" office:value="1" calcext:value-type="float">
            <text:p>1</text:p>
          </table:table-cell>
          <table:table-cell office:value-type="string" calcext:value-type="string">
            <text:p>マリョク</text:p>
          </table:table-cell>
          <table:table-cell table:formula="of:=VLOOKUP([.K27];[$種類番号.$A$1:$種類番号.$B$4];2;0)" office:value-type="float" office:value="4" calcext:value-type="float">
            <text:p>4</text:p>
          </table:table-cell>
          <table:table-cell office:value-type="string" calcext:value-type="string">
            <text:p>青</text:p>
          </table:table-cell>
          <table:table-cell table:formula="of:=VLOOKUP([.M27];[$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7];[$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V27];[$遺業能力番号.$A$1:$遺業能力番号.$B$9];2;0);0)" office:value-type="float" office:value="3" calcext:value-type="float">
            <text:p>3</text:p>
          </table:table-cell>
          <table:table-cell office:value-type="string" calcext:value-type="string">
            <text:p>https://one-draw.jp/ijinden/cardlist/B01/card/B_013.png</text:p>
          </table:table-cell>
          <table:table-cell table:formula="of:=CONCATENATE([$JSON.$A$1];[.$C27];[$JSON.$B$1];[.$E27];[$JSON.$C$1];[.$F27];[$JSON.$D$1];IF(ISNA([.$S27]);&quot;null&quot;;&quot;&quot;&quot;&quot;&amp;[.$S27]&amp;&quot;&quot;&quot;&quot;);[$JSON.$E$1];[.$U27];[$JSON.$F$1];IF(ISNA([.$V27]);&quot;null&quot;;&quot;&quot;&quot;&quot;&amp;[.$V27]&amp;&quot;&quot;&quot;&quot;);[$JSON.$G$1];[.$X27];[$JSON.$H$1];[.$H27];[$JSON.$I$1];[.J27];[$JSON.$J$1];[.$L27];[$JSON.$K$1];[.$O27];[$JSON.$L$1];[.$N27];[$JSON.$M$1];[.$R27];[$JSON.$N$1];[.$T27];[$JSON.$O$1];[.$W27];[$JSON.$P$1];[.$A27];[$JSON.$Q$1];[.$B27];[$JSON.$R$1])" office:value-type="string" office:string-value="{&quot;id&quot;:&quot;B-13&quot;,&quot;name&quot;:&quot;ブルーストーン&quot;,&quot;kana&quot;:&quot;ぶるーすとーん&quot;,&quot;traitText&quot;:null,&quot;ruleText&quot;:&quot;※デッキに何枚でも入れてよい。&quot;,&quot;legacyText&quot;:&quot;復元&quot;,&quot;imageUrl&quot;:&quot;https://one-draw.jp/ijinden/cardlist/B01/card/B_013.png&quot;,&quot;expansion&quot;:11,&quot;rarity&quot;:1,&quot;type&quot;:4,&quot;level&quot;:1,&quot;color&quot;:2,&quot;term&quot;:0,&quot;trait&quot;:0,&quot;legacy&quot;:3,&quot;orderTable&quot;:26,&quot;orderDeck&quot;:349}," calcext:value-type="string">
            <text:p>{"id":"B-13","name":"ブルーストーン","kana":"ぶるーすとーん","traitText":null,"ruleText":"※デッキに何枚でも入れてよい。","legacyText":"復元","imageUrl":"https://one-draw.jp/ijinden/cardlist/B01/card/B_013.png","expansion":11,"rarity":1,"type":4,"level":1,"color":2,"term":0,"trait":0,"legacy":3,"orderTable":26,"orderDeck":349},</text:p>
          </table:table-cell>
          <table:table-cell table:number-columns-repeated="16347"/>
        </table:table-row>
        <table:table-row table:style-name="ro2">
          <table:table-cell office:value-type="float" office:value="27" calcext:value-type="float">
            <text:p>27</text:p>
          </table:table-cell>
          <table:table-cell office:value-type="float" office:value="163" calcext:value-type="float">
            <text:p>163</text:p>
          </table:table-cell>
          <table:table-cell office:value-type="string" calcext:value-type="string">
            <text:p>G-1</text:p>
          </table:table-cell>
          <table:table-cell office:value-type="float" office:value="1" calcext:value-type="float">
            <text:p>1</text:p>
          </table:table-cell>
          <table:table-cell office:value-type="string" calcext:value-type="string">
            <text:p>出雲の阿国</text:p>
          </table:table-cell>
          <table:table-cell office:value-type="string" calcext:value-type="string">
            <text:p>いずものおくに</text:p>
          </table:table-cell>
          <table:table-cell office:value-type="string" calcext:value-type="string">
            <text:p>日本の大天才デッキ</text:p>
          </table:table-cell>
          <table:table-cell table:formula="of:=VLOOKUP([.G28];[$収録番号.$A$1:$収録番号.$B$9];2;0)" office:value-type="float" office:value="12" calcext:value-type="float">
            <text:p>12</text:p>
          </table:table-cell>
          <table:table-cell office:value-type="string" calcext:value-type="string">
            <text:p>SR</text:p>
          </table:table-cell>
          <table:table-cell table:formula="of:=VLOOKUP([.I28];[$レアリティ番号.$A$1:$レアリティ番号.$B$4];2;0)" office:value-type="float" office:value="4" calcext:value-type="float">
            <text:p>4</text:p>
          </table:table-cell>
          <table:table-cell office:value-type="string" calcext:value-type="string">
            <text:p>イジン</text:p>
          </table:table-cell>
          <table:table-cell table:formula="of:=VLOOKUP([.K28];[$種類番号.$A$1:$種類番号.$B$4];2;0)" office:value-type="float" office:value="1" calcext:value-type="float">
            <text:p>1</text:p>
          </table:table-cell>
          <table:table-cell office:value-type="string" calcext:value-type="string">
            <text:p>緑</text:p>
          </table:table-cell>
          <table:table-cell table:formula="of:=VLOOKUP([.M28];[$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特性番号.$A$1:$特性番号.$B$8];2;0);0)" office:value-type="float" office:value="0" calcext:value-type="float">
            <text:p>0</text:p>
          </table:table-cell>
          <table:table-cell office:value-type="string" calcext:value-type="string">
            <text:p>戦場に置かれたとき、自分の戦場のカードすべてを起こす。¶破壊されたとき、自分の魔力ゾーンのマリョク1つを裏にして発動できる。これを破壊されていない状態にする。</text:p>
          </table:table-cell>
          <table:table-cell table:style-name="ce8" office:value-type="string" calcext:value-type="string">
            <text:p>1ドローする</text:p>
          </table:table-cell>
          <table:table-cell table:formula="of:=IFERROR(VLOOKUP([.$V28];[$遺業能力番号.$A$1:$遺業能力番号.$B$9];2;0);0)" office:value-type="float" office:value="4" calcext:value-type="float">
            <text:p>4</text:p>
          </table:table-cell>
          <table:table-cell office:value-type="string" calcext:value-type="string">
            <text:p>https://one-draw.jp/ijinden/cardlist/G01/card/G_001.png</text:p>
          </table:table-cell>
          <table:table-cell table:formula="of:=CONCATENATE([$JSON.$A$1];[.$C28];[$JSON.$B$1];[.$E28];[$JSON.$C$1];[.$F28];[$JSON.$D$1];IF(ISNA([.$S28]);&quot;null&quot;;&quot;&quot;&quot;&quot;&amp;[.$S28]&amp;&quot;&quot;&quot;&quot;);[$JSON.$E$1];[.$U28];[$JSON.$F$1];IF(ISNA([.$V28]);&quot;null&quot;;&quot;&quot;&quot;&quot;&amp;[.$V28]&amp;&quot;&quot;&quot;&quot;);[$JSON.$G$1];[.$X28];[$JSON.$H$1];[.$H28];[$JSON.$I$1];[.J28];[$JSON.$J$1];[.$L28];[$JSON.$K$1];[.$O28];[$JSON.$L$1];[.$N28];[$JSON.$M$1];[.$R28];[$JSON.$N$1];[.$T28];[$JSON.$O$1];[.$W28];[$JSON.$P$1];[.$A28];[$JSON.$Q$1];[.$B28];[$JSON.$R$1])" office:value-type="string" office:string-value="{&quot;id&quot;:&quot;G-1&quot;,&quot;name&quot;:&quot;出雲の阿国&quot;,&quot;kana&quot;:&quot;いずものおくに&quot;,&quot;traitText&quot;:null,&quot;ruleText&quot;:&quot;戦場に置かれたとき、自分の戦場のカードすべてを起こす。¶破壊されたとき、自分の魔力ゾーンのマリョク1つを裏にして発動できる。これを破壊されていない状態にする。&quot;,&quot;legacyText&quot;:&quot;1ドローする&quot;,&quot;imageUrl&quot;:&quot;https://one-draw.jp/ijinden/cardlist/G01/card/G_001.png&quot;,&quot;expansion&quot;:12,&quot;rarity&quot;:4,&quot;type&quot;:1,&quot;level&quot;:5,&quot;color&quot;:4,&quot;term&quot;:0,&quot;trait&quot;:0,&quot;legacy&quot;:4,&quot;orderTable&quot;:27,&quot;orderDeck&quot;:163}," calcext:value-type="string">
            <text:p>{"id":"G-1","name":"出雲の阿国","kana":"いずものおくに","traitText":null,"ruleText":"戦場に置かれたとき、自分の戦場のカードすべてを起こす。¶破壊されたとき、自分の魔力ゾーンのマリョク1つを裏にして発動できる。これを破壊されていない状態にする。","legacyText":"1ドローする","imageUrl":"https://one-draw.jp/ijinden/cardlist/G01/card/G_001.png","expansion":12,"rarity":4,"type":1,"level":5,"color":4,"term":0,"trait":0,"legacy":4,"orderTable":27,"orderDeck":163},</text:p>
          </table:table-cell>
          <table:table-cell table:number-columns-repeated="16347"/>
        </table:table-row>
        <table:table-row table:style-name="ro2">
          <table:table-cell office:value-type="float" office:value="28" calcext:value-type="float">
            <text:p>28</text:p>
          </table:table-cell>
          <table:table-cell office:value-type="float" office:value="12" calcext:value-type="float">
            <text:p>12</text:p>
          </table:table-cell>
          <table:table-cell office:value-type="string" calcext:value-type="string">
            <text:p>G-2</text:p>
          </table:table-cell>
          <table:table-cell office:value-type="float" office:value="2" calcext:value-type="float">
            <text:p>2</text:p>
          </table:table-cell>
          <table:table-cell office:value-type="string" calcext:value-type="string">
            <text:p>卑弥呼</text:p>
          </table:table-cell>
          <table:table-cell office:value-type="string" calcext:value-type="string">
            <text:p>ひみこ</text:p>
          </table:table-cell>
          <table:table-cell office:value-type="string" calcext:value-type="string">
            <text:p>日本の大天才デッキ</text:p>
          </table:table-cell>
          <table:table-cell table:formula="of:=VLOOKUP([.G29];[$収録番号.$A$1:$収録番号.$B$9];2;0)" office:value-type="float" office:value="12" calcext:value-type="float">
            <text:p>12</text:p>
          </table:table-cell>
          <table:table-cell office:value-type="string" calcext:value-type="string">
            <text:p>N</text:p>
          </table:table-cell>
          <table:table-cell table:formula="of:=VLOOKUP([.I29];[$レアリティ番号.$A$1:$レアリティ番号.$B$4];2;0)" office:value-type="float" office:value="1" calcext:value-type="float">
            <text:p>1</text:p>
          </table:table-cell>
          <table:table-cell office:value-type="string" calcext:value-type="string">
            <text:p>イジン</text:p>
          </table:table-cell>
          <table:table-cell table:formula="of:=VLOOKUP([.K29];[$種類番号.$A$1:$種類番号.$B$4];2;0)" office:value-type="float" office:value="1" calcext:value-type="float">
            <text:p>1</text:p>
          </table:table-cell>
          <table:table-cell office:value-type="string" calcext:value-type="string">
            <text:p>緑</text:p>
          </table:table-cell>
          <table:table-cell table:formula="of:=VLOOKUP([.M29];[$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特性番号.$A$1:$特性番号.$B$8];2;0);0)" office:value-type="float" office:value="0" calcext:value-type="float">
            <text:p>0</text:p>
          </table:table-cell>
          <table:table-cell office:value-type="string" calcext:value-type="string">
            <text:p>戦場に置かれたとき、自分の山札の上から1枚を、裏のまま魔力ゾーンに置く。</text:p>
          </table:table-cell>
          <table:table-cell table:style-name="ce8" table:formula="of:=NA()" office:value-type="string" office:string-value="" calcext:value-type="error">
            <text:p>#N/A</text:p>
          </table:table-cell>
          <table:table-cell table:formula="of:=IFERROR(VLOOKUP([.$V29];[$遺業能力番号.$A$1:$遺業能力番号.$B$9];2;0);0)" office:value-type="float" office:value="0" calcext:value-type="float">
            <text:p>0</text:p>
          </table:table-cell>
          <table:table-cell office:value-type="string" calcext:value-type="string">
            <text:p>https://one-draw.jp/ijinden/cardlist/G01/card/G_002.png</text:p>
          </table:table-cell>
          <table:table-cell table:formula="of:=CONCATENATE([$JSON.$A$1];[.$C29];[$JSON.$B$1];[.$E29];[$JSON.$C$1];[.$F29];[$JSON.$D$1];IF(ISNA([.$S29]);&quot;null&quot;;&quot;&quot;&quot;&quot;&amp;[.$S29]&amp;&quot;&quot;&quot;&quot;);[$JSON.$E$1];[.$U29];[$JSON.$F$1];IF(ISNA([.$V29]);&quot;null&quot;;&quot;&quot;&quot;&quot;&amp;[.$V29]&amp;&quot;&quot;&quot;&quot;);[$JSON.$G$1];[.$X29];[$JSON.$H$1];[.$H29];[$JSON.$I$1];[.J29];[$JSON.$J$1];[.$L29];[$JSON.$K$1];[.$O29];[$JSON.$L$1];[.$N29];[$JSON.$M$1];[.$R29];[$JSON.$N$1];[.$T29];[$JSON.$O$1];[.$W29];[$JSON.$P$1];[.$A29];[$JSON.$Q$1];[.$B29];[$JSON.$R$1])" office:value-type="string" office:string-value="{&quot;id&quot;:&quot;G-2&quot;,&quot;name&quot;:&quot;卑弥呼&quot;,&quot;kana&quot;:&quot;ひみこ&quot;,&quot;traitText&quot;:null,&quot;ruleText&quot;:&quot;戦場に置かれたとき、自分の山札の上から1枚を、裏のまま魔力ゾーンに置く。&quot;,&quot;legacyText&quot;:null,&quot;imageUrl&quot;:&quot;https://one-draw.jp/ijinden/cardlist/G01/card/G_002.png&quot;,&quot;expansion&quot;:12,&quot;rarity&quot;:1,&quot;type&quot;:1,&quot;level&quot;:1,&quot;color&quot;:4,&quot;term&quot;:0,&quot;trait&quot;:0,&quot;legacy&quot;:0,&quot;orderTable&quot;:28,&quot;orderDeck&quot;:12}," calcext:value-type="string">
            <text:p>{"id":"G-2","name":"卑弥呼","kana":"ひみこ","traitText":null,"ruleText":"戦場に置かれたとき、自分の山札の上から1枚を、裏のまま魔力ゾーンに置く。","legacyText":null,"imageUrl":"https://one-draw.jp/ijinden/cardlist/G01/card/G_002.png","expansion":12,"rarity":1,"type":1,"level":1,"color":4,"term":0,"trait":0,"legacy":0,"orderTable":28,"orderDeck":12},</text:p>
          </table:table-cell>
          <table:table-cell table:number-columns-repeated="16347"/>
        </table:table-row>
        <table:table-row table:style-name="ro2">
          <table:table-cell office:value-type="float" office:value="29" calcext:value-type="float">
            <text:p>29</text:p>
          </table:table-cell>
          <table:table-cell office:value-type="float" office:value="84" calcext:value-type="float">
            <text:p>84</text:p>
          </table:table-cell>
          <table:table-cell office:value-type="string" calcext:value-type="string">
            <text:p>G-3</text:p>
          </table:table-cell>
          <table:table-cell office:value-type="float" office:value="3" calcext:value-type="float">
            <text:p>3</text:p>
          </table:table-cell>
          <table:table-cell office:value-type="string" calcext:value-type="string">
            <text:p>アテルイ</text:p>
          </table:table-cell>
          <table:table-cell office:value-type="string" calcext:value-type="string">
            <text:p>あてるい</text:p>
          </table:table-cell>
          <table:table-cell office:value-type="string" calcext:value-type="string">
            <text:p>日本の大天才デッキ</text:p>
          </table:table-cell>
          <table:table-cell table:formula="of:=VLOOKUP([.G30];[$収録番号.$A$1:$収録番号.$B$9];2;0)" office:value-type="float" office:value="12" calcext:value-type="float">
            <text:p>12</text:p>
          </table:table-cell>
          <table:table-cell office:value-type="string" calcext:value-type="string">
            <text:p>N</text:p>
          </table:table-cell>
          <table:table-cell table:formula="of:=VLOOKUP([.I30];[$レアリティ番号.$A$1:$レアリティ番号.$B$4];2;0)" office:value-type="float" office:value="1" calcext:value-type="float">
            <text:p>1</text:p>
          </table:table-cell>
          <table:table-cell office:value-type="string" calcext:value-type="string">
            <text:p>イジン</text:p>
          </table:table-cell>
          <table:table-cell table:formula="of:=VLOOKUP([.K30];[$種類番号.$A$1:$種類番号.$B$4];2;0)" office:value-type="float" office:value="1" calcext:value-type="float">
            <text:p>1</text:p>
          </table:table-cell>
          <table:table-cell office:value-type="string" calcext:value-type="string">
            <text:p>緑</text:p>
          </table:table-cell>
          <table:table-cell table:formula="of:=VLOOKUP([.M30];[$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特性番号.$A$1:$特性番号.$B$8];2;0);0)" office:value-type="float" office:value="0" calcext:value-type="float">
            <text:p>0</text:p>
          </table:table-cell>
          <table:table-cell office:value-type="string" calcext:value-type="string">
            <text:p>「剣術」イジンが戦場に置かれたとき、これを起こす。¶アタック+1000</text:p>
          </table:table-cell>
          <table:table-cell table:style-name="ce8" office:value-type="string" calcext:value-type="string">
            <text:p>1ドローする</text:p>
          </table:table-cell>
          <table:table-cell table:formula="of:=IFERROR(VLOOKUP([.$V30];[$遺業能力番号.$A$1:$遺業能力番号.$B$9];2;0);0)" office:value-type="float" office:value="4" calcext:value-type="float">
            <text:p>4</text:p>
          </table:table-cell>
          <table:table-cell office:value-type="string" calcext:value-type="string">
            <text:p>https://one-draw.jp/ijinden/cardlist/G01/card/G_003.png</text:p>
          </table:table-cell>
          <table:table-cell table:formula="of:=CONCATENATE([$JSON.$A$1];[.$C30];[$JSON.$B$1];[.$E30];[$JSON.$C$1];[.$F30];[$JSON.$D$1];IF(ISNA([.$S30]);&quot;null&quot;;&quot;&quot;&quot;&quot;&amp;[.$S30]&amp;&quot;&quot;&quot;&quot;);[$JSON.$E$1];[.$U30];[$JSON.$F$1];IF(ISNA([.$V30]);&quot;null&quot;;&quot;&quot;&quot;&quot;&amp;[.$V30]&amp;&quot;&quot;&quot;&quot;);[$JSON.$G$1];[.$X30];[$JSON.$H$1];[.$H30];[$JSON.$I$1];[.J30];[$JSON.$J$1];[.$L30];[$JSON.$K$1];[.$O30];[$JSON.$L$1];[.$N30];[$JSON.$M$1];[.$R30];[$JSON.$N$1];[.$T30];[$JSON.$O$1];[.$W30];[$JSON.$P$1];[.$A30];[$JSON.$Q$1];[.$B30];[$JSON.$R$1])" office:value-type="string" office:string-value="{&quot;id&quot;:&quot;G-3&quot;,&quot;name&quot;:&quot;アテルイ&quot;,&quot;kana&quot;:&quot;あてるい&quot;,&quot;traitText&quot;:null,&quot;ruleText&quot;:&quot;「剣術」イジンが戦場に置かれたとき、これを起こす。¶アタック+1000&quot;,&quot;legacyText&quot;:&quot;1ドローする&quot;,&quot;imageUrl&quot;:&quot;https://one-draw.jp/ijinden/cardlist/G01/card/G_003.png&quot;,&quot;expansion&quot;:12,&quot;rarity&quot;:1,&quot;type&quot;:1,&quot;level&quot;:3,&quot;color&quot;:4,&quot;term&quot;:0,&quot;trait&quot;:0,&quot;legacy&quot;:4,&quot;orderTable&quot;:29,&quot;orderDeck&quot;:84}," calcext:value-type="string">
            <text:p>{"id":"G-3","name":"アテルイ","kana":"あてるい","traitText":null,"ruleText":"「剣術」イジンが戦場に置かれたとき、これを起こす。¶アタック+1000","legacyText":"1ドローする","imageUrl":"https://one-draw.jp/ijinden/cardlist/G01/card/G_003.png","expansion":12,"rarity":1,"type":1,"level":3,"color":4,"term":0,"trait":0,"legacy":4,"orderTable":29,"orderDeck":84},</text:p>
          </table:table-cell>
          <table:table-cell table:number-columns-repeated="16347"/>
        </table:table-row>
        <table:table-row table:style-name="ro2">
          <table:table-cell office:value-type="float" office:value="30" calcext:value-type="float">
            <text:p>30</text:p>
          </table:table-cell>
          <table:table-cell office:value-type="float" office:value="44" calcext:value-type="float">
            <text:p>44</text:p>
          </table:table-cell>
          <table:table-cell office:value-type="string" calcext:value-type="string">
            <text:p>G-4</text:p>
          </table:table-cell>
          <table:table-cell office:value-type="float" office:value="4" calcext:value-type="float">
            <text:p>4</text:p>
          </table:table-cell>
          <table:table-cell office:value-type="string" calcext:value-type="string">
            <text:p>紀貫之</text:p>
          </table:table-cell>
          <table:table-cell office:value-type="string" calcext:value-type="string">
            <text:p>きのつらゆき</text:p>
          </table:table-cell>
          <table:table-cell office:value-type="string" calcext:value-type="string">
            <text:p>日本の大天才デッキ</text:p>
          </table:table-cell>
          <table:table-cell table:formula="of:=VLOOKUP([.G31];[$収録番号.$A$1:$収録番号.$B$9];2;0)" office:value-type="float" office:value="12" calcext:value-type="float">
            <text:p>12</text:p>
          </table:table-cell>
          <table:table-cell office:value-type="string" calcext:value-type="string">
            <text:p>N</text:p>
          </table:table-cell>
          <table:table-cell table:formula="of:=VLOOKUP([.I31];[$レアリティ番号.$A$1:$レアリティ番号.$B$4];2;0)" office:value-type="float" office:value="1" calcext:value-type="float">
            <text:p>1</text:p>
          </table:table-cell>
          <table:table-cell office:value-type="string" calcext:value-type="string">
            <text:p>イジン</text:p>
          </table:table-cell>
          <table:table-cell table:formula="of:=VLOOKUP([.K31];[$種類番号.$A$1:$種類番号.$B$4];2;0)" office:value-type="float" office:value="1" calcext:value-type="float">
            <text:p>1</text:p>
          </table:table-cell>
          <table:table-cell office:value-type="string" calcext:value-type="string">
            <text:p>緑</text:p>
          </table:table-cell>
          <table:table-cell table:formula="of:=VLOOKUP([.M31];[$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Q3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31];[$特性番号.$A$1:$特性番号.$B$8];2;0);0)" office:value-type="float" office:value="0" calcext:value-type="float">
            <text:p>0</text:p>
          </table:table-cell>
          <table:table-cell office:value-type="string" calcext:value-type="string">
            <text:p>執筆 - ハイケイが戦場に置かれたとき、これを裏にして魔力ゾーンに置く。</text:p>
          </table:table-cell>
          <table:table-cell table:style-name="ce8" office:value-type="string" calcext:value-type="string">
            <text:p>1ドローする</text:p>
          </table:table-cell>
          <table:table-cell table:formula="of:=IFERROR(VLOOKUP([.$V31];[$遺業能力番号.$A$1:$遺業能力番号.$B$9];2;0);0)" office:value-type="float" office:value="4" calcext:value-type="float">
            <text:p>4</text:p>
          </table:table-cell>
          <table:table-cell office:value-type="string" calcext:value-type="string">
            <text:p>https://one-draw.jp/ijinden/cardlist/G01/card/G_004.png</text:p>
          </table:table-cell>
          <table:table-cell table:formula="of:=CONCATENATE([$JSON.$A$1];[.$C31];[$JSON.$B$1];[.$E31];[$JSON.$C$1];[.$F31];[$JSON.$D$1];IF(ISNA([.$S31]);&quot;null&quot;;&quot;&quot;&quot;&quot;&amp;[.$S31]&amp;&quot;&quot;&quot;&quot;);[$JSON.$E$1];[.$U31];[$JSON.$F$1];IF(ISNA([.$V31]);&quot;null&quot;;&quot;&quot;&quot;&quot;&amp;[.$V31]&amp;&quot;&quot;&quot;&quot;);[$JSON.$G$1];[.$X31];[$JSON.$H$1];[.$H31];[$JSON.$I$1];[.J31];[$JSON.$J$1];[.$L31];[$JSON.$K$1];[.$O31];[$JSON.$L$1];[.$N31];[$JSON.$M$1];[.$R31];[$JSON.$N$1];[.$T31];[$JSON.$O$1];[.$W31];[$JSON.$P$1];[.$A31];[$JSON.$Q$1];[.$B31];[$JSON.$R$1])" office:value-type="string" office:string-value="{&quot;id&quot;:&quot;G-4&quot;,&quot;name&quot;:&quot;紀貫之&quot;,&quot;kana&quot;:&quot;きのつらゆき&quot;,&quot;traitText&quot;:null,&quot;ruleText&quot;:&quot;執筆 - ハイケイが戦場に置かれたとき、これを裏にして魔力ゾーンに置く。&quot;,&quot;legacyText&quot;:&quot;1ドローする&quot;,&quot;imageUrl&quot;:&quot;https://one-draw.jp/ijinden/cardlist/G01/card/G_004.png&quot;,&quot;expansion&quot;:12,&quot;rarity&quot;:1,&quot;type&quot;:1,&quot;level&quot;:2,&quot;color&quot;:4,&quot;term&quot;:2,&quot;trait&quot;:0,&quot;legacy&quot;:4,&quot;orderTable&quot;:30,&quot;orderDeck&quot;:44}," calcext:value-type="string">
            <text:p>{"id":"G-4","name":"紀貫之","kana":"きのつらゆき","traitText":null,"ruleText":"執筆 - ハイケイが戦場に置かれたとき、これを裏にして魔力ゾーンに置く。","legacyText":"1ドローする","imageUrl":"https://one-draw.jp/ijinden/cardlist/G01/card/G_004.png","expansion":12,"rarity":1,"type":1,"level":2,"color":4,"term":2,"trait":0,"legacy":4,"orderTable":30,"orderDeck":44},</text:p>
          </table:table-cell>
          <table:table-cell table:number-columns-repeated="16347"/>
        </table:table-row>
        <table:table-row table:style-name="ro2">
          <table:table-cell office:value-type="float" office:value="31" calcext:value-type="float">
            <text:p>31</text:p>
          </table:table-cell>
          <table:table-cell office:value-type="float" office:value="123" calcext:value-type="float">
            <text:p>123</text:p>
          </table:table-cell>
          <table:table-cell office:value-type="string" calcext:value-type="string">
            <text:p>G-5</text:p>
          </table:table-cell>
          <table:table-cell office:value-type="float" office:value="5" calcext:value-type="float">
            <text:p>5</text:p>
          </table:table-cell>
          <table:table-cell office:value-type="string" calcext:value-type="string">
            <text:p>阿倍仲麻呂</text:p>
          </table:table-cell>
          <table:table-cell office:value-type="string" calcext:value-type="string">
            <text:p>あべのなかまろ</text:p>
          </table:table-cell>
          <table:table-cell office:value-type="string" calcext:value-type="string">
            <text:p>日本の大天才デッキ</text:p>
          </table:table-cell>
          <table:table-cell table:formula="of:=VLOOKUP([.G32];[$収録番号.$A$1:$収録番号.$B$9];2;0)" office:value-type="float" office:value="12" calcext:value-type="float">
            <text:p>12</text:p>
          </table:table-cell>
          <table:table-cell office:value-type="string" calcext:value-type="string">
            <text:p>N</text:p>
          </table:table-cell>
          <table:table-cell table:formula="of:=VLOOKUP([.I32];[$レアリティ番号.$A$1:$レアリティ番号.$B$4];2;0)" office:value-type="float" office:value="1" calcext:value-type="float">
            <text:p>1</text:p>
          </table:table-cell>
          <table:table-cell office:value-type="string" calcext:value-type="string">
            <text:p>イジン</text:p>
          </table:table-cell>
          <table:table-cell table:formula="of:=VLOOKUP([.K32];[$種類番号.$A$1:$種類番号.$B$4];2;0)" office:value-type="float" office:value="1" calcext:value-type="float">
            <text:p>1</text:p>
          </table:table-cell>
          <table:table-cell office:value-type="string" calcext:value-type="string">
            <text:p>緑</text:p>
          </table:table-cell>
          <table:table-cell table:formula="of:=VLOOKUP([.M32];[$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特性番号.$A$1:$特性番号.$B$8];2;0);0)" office:value-type="float" office:value="0" calcext:value-type="float">
            <text:p>0</text:p>
          </table:table-cell>
          <table:table-cell office:value-type="string" calcext:value-type="string">
            <text:p>「航海」が発動したとき、1ドローして、これを起こす。</text:p>
          </table:table-cell>
          <table:table-cell table:style-name="ce8" table:formula="of:=NA()" office:value-type="string" office:string-value="" calcext:value-type="error">
            <text:p>#N/A</text:p>
          </table:table-cell>
          <table:table-cell table:formula="of:=IFERROR(VLOOKUP([.$V32];[$遺業能力番号.$A$1:$遺業能力番号.$B$9];2;0);0)" office:value-type="float" office:value="0" calcext:value-type="float">
            <text:p>0</text:p>
          </table:table-cell>
          <table:table-cell office:value-type="string" calcext:value-type="string">
            <text:p>https://one-draw.jp/ijinden/cardlist/G01/card/G_005.png</text:p>
          </table:table-cell>
          <table:table-cell table:formula="of:=CONCATENATE([$JSON.$A$1];[.$C32];[$JSON.$B$1];[.$E32];[$JSON.$C$1];[.$F32];[$JSON.$D$1];IF(ISNA([.$S32]);&quot;null&quot;;&quot;&quot;&quot;&quot;&amp;[.$S32]&amp;&quot;&quot;&quot;&quot;);[$JSON.$E$1];[.$U32];[$JSON.$F$1];IF(ISNA([.$V32]);&quot;null&quot;;&quot;&quot;&quot;&quot;&amp;[.$V32]&amp;&quot;&quot;&quot;&quot;);[$JSON.$G$1];[.$X32];[$JSON.$H$1];[.$H32];[$JSON.$I$1];[.J32];[$JSON.$J$1];[.$L32];[$JSON.$K$1];[.$O32];[$JSON.$L$1];[.$N32];[$JSON.$M$1];[.$R32];[$JSON.$N$1];[.$T32];[$JSON.$O$1];[.$W32];[$JSON.$P$1];[.$A32];[$JSON.$Q$1];[.$B32];[$JSON.$R$1])" office:value-type="string" office:string-value="{&quot;id&quot;:&quot;G-5&quot;,&quot;name&quot;:&quot;阿倍仲麻呂&quot;,&quot;kana&quot;:&quot;あべのなかまろ&quot;,&quot;traitText&quot;:null,&quot;ruleText&quot;:&quot;「航海」が発動したとき、1ドローして、これを起こす。&quot;,&quot;legacyText&quot;:null,&quot;imageUrl&quot;:&quot;https://one-draw.jp/ijinden/cardlist/G01/card/G_005.png&quot;,&quot;expansion&quot;:12,&quot;rarity&quot;:1,&quot;type&quot;:1,&quot;level&quot;:4,&quot;color&quot;:4,&quot;term&quot;:0,&quot;trait&quot;:0,&quot;legacy&quot;:0,&quot;orderTable&quot;:31,&quot;orderDeck&quot;:123}," calcext:value-type="string">
            <text:p>{"id":"G-5","name":"阿倍仲麻呂","kana":"あべのなかまろ","traitText":null,"ruleText":"「航海」が発動したとき、1ドローして、これを起こす。","legacyText":null,"imageUrl":"https://one-draw.jp/ijinden/cardlist/G01/card/G_005.png","expansion":12,"rarity":1,"type":1,"level":4,"color":4,"term":0,"trait":0,"legacy":0,"orderTable":31,"orderDeck":123},</text:p>
          </table:table-cell>
          <table:table-cell table:number-columns-repeated="16347"/>
        </table:table-row>
        <table:table-row table:style-name="ro2">
          <table:table-cell office:value-type="float" office:value="32" calcext:value-type="float">
            <text:p>32</text:p>
          </table:table-cell>
          <table:table-cell office:value-type="float" office:value="85" calcext:value-type="float">
            <text:p>85</text:p>
          </table:table-cell>
          <table:table-cell office:value-type="string" calcext:value-type="string">
            <text:p>G-6</text:p>
          </table:table-cell>
          <table:table-cell office:value-type="float" office:value="6" calcext:value-type="float">
            <text:p>6</text:p>
          </table:table-cell>
          <table:table-cell office:value-type="string" calcext:value-type="string">
            <text:p>葛飾北斎</text:p>
          </table:table-cell>
          <table:table-cell office:value-type="string" calcext:value-type="string">
            <text:p>かつしかほくさい</text:p>
          </table:table-cell>
          <table:table-cell office:value-type="string" calcext:value-type="string">
            <text:p>日本の大天才デッキ</text:p>
          </table:table-cell>
          <table:table-cell table:formula="of:=VLOOKUP([.G33];[$収録番号.$A$1:$収録番号.$B$9];2;0)" office:value-type="float" office:value="12" calcext:value-type="float">
            <text:p>12</text:p>
          </table:table-cell>
          <table:table-cell office:value-type="string" calcext:value-type="string">
            <text:p>N</text:p>
          </table:table-cell>
          <table:table-cell table:formula="of:=VLOOKUP([.I33];[$レアリティ番号.$A$1:$レアリティ番号.$B$4];2;0)" office:value-type="float" office:value="1" calcext:value-type="float">
            <text:p>1</text:p>
          </table:table-cell>
          <table:table-cell office:value-type="string" calcext:value-type="string">
            <text:p>イジン</text:p>
          </table:table-cell>
          <table:table-cell table:formula="of:=VLOOKUP([.K33];[$種類番号.$A$1:$種類番号.$B$4];2;0)" office:value-type="float" office:value="1" calcext:value-type="float">
            <text:p>1</text:p>
          </table:table-cell>
          <table:table-cell office:value-type="string" calcext:value-type="string">
            <text:p>緑</text:p>
          </table:table-cell>
          <table:table-cell table:formula="of:=VLOOKUP([.M33];[$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能力語番号.$A$1:$能力語番号.$B$10];2;0);0)" office:value-type="float" office:value="0" calcext:value-type="float">
            <text:p>0</text:p>
          </table:table-cell>
          <table:table-cell office:value-type="string" calcext:value-type="string">
            <text:p>美術</text:p>
          </table:table-cell>
          <table:table-cell table:formula="of:=IFERROR(VLOOKUP([.$S33];[$特性番号.$A$1:$特性番号.$B$8];2;0);0)" office:value-type="float" office:value="2" calcext:value-type="float">
            <text:p>2</text:p>
          </table:table-cell>
          <table:table-cell office:value-type="string" calcext:value-type="string">
            <text:p>戦場に置かれたとき、自分の墓地のハイケイ1つか2つを指定して発動できる。それらのハイケイすべてを手札に戻す。</text:p>
          </table:table-cell>
          <table:table-cell table:style-name="ce8" office:value-type="string" calcext:value-type="string">
            <text:p>1ドローする</text:p>
          </table:table-cell>
          <table:table-cell table:formula="of:=IFERROR(VLOOKUP([.$V33];[$遺業能力番号.$A$1:$遺業能力番号.$B$9];2;0);0)" office:value-type="float" office:value="4" calcext:value-type="float">
            <text:p>4</text:p>
          </table:table-cell>
          <table:table-cell office:value-type="string" calcext:value-type="string">
            <text:p>https://one-draw.jp/ijinden/cardlist/G01/card/G_006.png</text:p>
          </table:table-cell>
          <table:table-cell table:formula="of:=CONCATENATE([$JSON.$A$1];[.$C33];[$JSON.$B$1];[.$E33];[$JSON.$C$1];[.$F33];[$JSON.$D$1];IF(ISNA([.$S33]);&quot;null&quot;;&quot;&quot;&quot;&quot;&amp;[.$S33]&amp;&quot;&quot;&quot;&quot;);[$JSON.$E$1];[.$U33];[$JSON.$F$1];IF(ISNA([.$V33]);&quot;null&quot;;&quot;&quot;&quot;&quot;&amp;[.$V33]&amp;&quot;&quot;&quot;&quot;);[$JSON.$G$1];[.$X33];[$JSON.$H$1];[.$H33];[$JSON.$I$1];[.J33];[$JSON.$J$1];[.$L33];[$JSON.$K$1];[.$O33];[$JSON.$L$1];[.$N33];[$JSON.$M$1];[.$R33];[$JSON.$N$1];[.$T33];[$JSON.$O$1];[.$W33];[$JSON.$P$1];[.$A33];[$JSON.$Q$1];[.$B33];[$JSON.$R$1])" office:value-type="string" office:string-value="{&quot;id&quot;:&quot;G-6&quot;,&quot;name&quot;:&quot;葛飾北斎&quot;,&quot;kana&quot;:&quot;かつしかほくさい&quot;,&quot;traitText&quot;:&quot;美術&quot;,&quot;ruleText&quot;:&quot;戦場に置かれたとき、自分の墓地のハイケイ1つか2つを指定して発動できる。それらのハイケイすべてを手札に戻す。&quot;,&quot;legacyText&quot;:&quot;1ドローする&quot;,&quot;imageUrl&quot;:&quot;https://one-draw.jp/ijinden/cardlist/G01/card/G_006.png&quot;,&quot;expansion&quot;:12,&quot;rarity&quot;:1,&quot;type&quot;:1,&quot;level&quot;:3,&quot;color&quot;:4,&quot;term&quot;:0,&quot;trait&quot;:2,&quot;legacy&quot;:4,&quot;orderTable&quot;:32,&quot;orderDeck&quot;:85}," calcext:value-type="string">
            <text:p>{"id":"G-6","name":"葛飾北斎","kana":"かつしかほくさい","traitText":"美術","ruleText":"戦場に置かれたとき、自分の墓地のハイケイ1つか2つを指定して発動できる。それらのハイケイすべてを手札に戻す。","legacyText":"1ドローする","imageUrl":"https://one-draw.jp/ijinden/cardlist/G01/card/G_006.png","expansion":12,"rarity":1,"type":1,"level":3,"color":4,"term":0,"trait":2,"legacy":4,"orderTable":32,"orderDeck":85},</text:p>
          </table:table-cell>
          <table:table-cell table:number-columns-repeated="16347"/>
        </table:table-row>
        <table:table-row table:style-name="ro2">
          <table:table-cell office:value-type="float" office:value="33" calcext:value-type="float">
            <text:p>33</text:p>
          </table:table-cell>
          <table:table-cell office:value-type="float" office:value="124" calcext:value-type="float">
            <text:p>124</text:p>
          </table:table-cell>
          <table:table-cell office:value-type="string" calcext:value-type="string">
            <text:p>G-7</text:p>
          </table:table-cell>
          <table:table-cell office:value-type="float" office:value="7" calcext:value-type="float">
            <text:p>7</text:p>
          </table:table-cell>
          <table:table-cell office:value-type="string" calcext:value-type="string">
            <text:p>藤原定家</text:p>
          </table:table-cell>
          <table:table-cell office:value-type="string" calcext:value-type="string">
            <text:p>ふじわらのていか</text:p>
          </table:table-cell>
          <table:table-cell office:value-type="string" calcext:value-type="string">
            <text:p>日本の大天才デッキ</text:p>
          </table:table-cell>
          <table:table-cell table:formula="of:=VLOOKUP([.G34];[$収録番号.$A$1:$収録番号.$B$9];2;0)" office:value-type="float" office:value="12" calcext:value-type="float">
            <text:p>12</text:p>
          </table:table-cell>
          <table:table-cell office:value-type="string" calcext:value-type="string">
            <text:p>N</text:p>
          </table:table-cell>
          <table:table-cell table:formula="of:=VLOOKUP([.I34];[$レアリティ番号.$A$1:$レアリティ番号.$B$4];2;0)" office:value-type="float" office:value="1" calcext:value-type="float">
            <text:p>1</text:p>
          </table:table-cell>
          <table:table-cell office:value-type="string" calcext:value-type="string">
            <text:p>イジン</text:p>
          </table:table-cell>
          <table:table-cell table:formula="of:=VLOOKUP([.K34];[$種類番号.$A$1:$種類番号.$B$4];2;0)" office:value-type="float" office:value="1" calcext:value-type="float">
            <text:p>1</text:p>
          </table:table-cell>
          <table:table-cell office:value-type="string" calcext:value-type="string">
            <text:p>緑</text:p>
          </table:table-cell>
          <table:table-cell table:formula="of:=VLOOKUP([.M34];[$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執筆</text:p>
          </table:table-cell>
          <table:table-cell table:formula="of:=IFERROR(VLOOKUP([.$Q34];[$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34];[$特性番号.$A$1:$特性番号.$B$8];2;0);0)" office:value-type="float" office:value="0" calcext:value-type="float">
            <text:p>0</text:p>
          </table:table-cell>
          <table:table-cell office:value-type="string" calcext:value-type="string">
            <text:p>執筆 - ハイケイが戦場に置かれたとき、自分の戦場のカードすべてを起こす。</text:p>
          </table:table-cell>
          <table:table-cell table:style-name="ce8" table:formula="of:=NA()" office:value-type="string" office:string-value="" calcext:value-type="error">
            <text:p>#N/A</text:p>
          </table:table-cell>
          <table:table-cell table:formula="of:=IFERROR(VLOOKUP([.$V34];[$遺業能力番号.$A$1:$遺業能力番号.$B$9];2;0);0)" office:value-type="float" office:value="0" calcext:value-type="float">
            <text:p>0</text:p>
          </table:table-cell>
          <table:table-cell office:value-type="string" calcext:value-type="string">
            <text:p>https://one-draw.jp/ijinden/cardlist/G01/card/G_007.png</text:p>
          </table:table-cell>
          <table:table-cell table:formula="of:=CONCATENATE([$JSON.$A$1];[.$C34];[$JSON.$B$1];[.$E34];[$JSON.$C$1];[.$F34];[$JSON.$D$1];IF(ISNA([.$S34]);&quot;null&quot;;&quot;&quot;&quot;&quot;&amp;[.$S34]&amp;&quot;&quot;&quot;&quot;);[$JSON.$E$1];[.$U34];[$JSON.$F$1];IF(ISNA([.$V34]);&quot;null&quot;;&quot;&quot;&quot;&quot;&amp;[.$V34]&amp;&quot;&quot;&quot;&quot;);[$JSON.$G$1];[.$X34];[$JSON.$H$1];[.$H34];[$JSON.$I$1];[.J34];[$JSON.$J$1];[.$L34];[$JSON.$K$1];[.$O34];[$JSON.$L$1];[.$N34];[$JSON.$M$1];[.$R34];[$JSON.$N$1];[.$T34];[$JSON.$O$1];[.$W34];[$JSON.$P$1];[.$A34];[$JSON.$Q$1];[.$B34];[$JSON.$R$1])" office:value-type="string" office:string-value="{&quot;id&quot;:&quot;G-7&quot;,&quot;name&quot;:&quot;藤原定家&quot;,&quot;kana&quot;:&quot;ふじわらのていか&quot;,&quot;traitText&quot;:null,&quot;ruleText&quot;:&quot;執筆 - ハイケイが戦場に置かれたとき、自分の戦場のカードすべてを起こす。&quot;,&quot;legacyText&quot;:null,&quot;imageUrl&quot;:&quot;https://one-draw.jp/ijinden/cardlist/G01/card/G_007.png&quot;,&quot;expansion&quot;:12,&quot;rarity&quot;:1,&quot;type&quot;:1,&quot;level&quot;:4,&quot;color&quot;:4,&quot;term&quot;:2,&quot;trait&quot;:0,&quot;legacy&quot;:0,&quot;orderTable&quot;:33,&quot;orderDeck&quot;:124}," calcext:value-type="string">
            <text:p>{"id":"G-7","name":"藤原定家","kana":"ふじわらのていか","traitText":null,"ruleText":"執筆 - ハイケイが戦場に置かれたとき、自分の戦場のカードすべてを起こす。","legacyText":null,"imageUrl":"https://one-draw.jp/ijinden/cardlist/G01/card/G_007.png","expansion":12,"rarity":1,"type":1,"level":4,"color":4,"term":2,"trait":0,"legacy":0,"orderTable":33,"orderDeck":124},</text:p>
          </table:table-cell>
          <table:table-cell table:number-columns-repeated="16347"/>
        </table:table-row>
        <table:table-row table:style-name="ro2">
          <table:table-cell office:value-type="float" office:value="34" calcext:value-type="float">
            <text:p>34</text:p>
          </table:table-cell>
          <table:table-cell office:value-type="float" office:value="221" calcext:value-type="float">
            <text:p>221</text:p>
          </table:table-cell>
          <table:table-cell office:value-type="string" calcext:value-type="string">
            <text:p>G-8</text:p>
          </table:table-cell>
          <table:table-cell office:value-type="float" office:value="8" calcext:value-type="float">
            <text:p>8</text:p>
          </table:table-cell>
          <table:table-cell office:value-type="string" calcext:value-type="string">
            <text:p>最澄</text:p>
          </table:table-cell>
          <table:table-cell office:value-type="string" calcext:value-type="string">
            <text:p>さいちょう</text:p>
          </table:table-cell>
          <table:table-cell office:value-type="string" calcext:value-type="string">
            <text:p>日本の大天才デッキ</text:p>
          </table:table-cell>
          <table:table-cell table:formula="of:=VLOOKUP([.G35];[$収録番号.$A$1:$収録番号.$B$9];2;0)" office:value-type="float" office:value="12" calcext:value-type="float">
            <text:p>12</text:p>
          </table:table-cell>
          <table:table-cell office:value-type="string" calcext:value-type="string">
            <text:p>N</text:p>
          </table:table-cell>
          <table:table-cell table:formula="of:=VLOOKUP([.I35];[$レアリティ番号.$A$1:$レアリティ番号.$B$4];2;0)" office:value-type="float" office:value="1" calcext:value-type="float">
            <text:p>1</text:p>
          </table:table-cell>
          <table:table-cell office:value-type="string" calcext:value-type="string">
            <text:p>イジン</text:p>
          </table:table-cell>
          <table:table-cell table:formula="of:=VLOOKUP([.K35];[$種類番号.$A$1:$種類番号.$B$4];2;0)" office:value-type="float" office:value="1" calcext:value-type="float">
            <text:p>1</text:p>
          </table:table-cell>
          <table:table-cell office:value-type="string" calcext:value-type="string">
            <text:p>緑</text:p>
          </table:table-cell>
          <table:table-cell table:formula="of:=VLOOKUP([.M35];[$色番号.$A$1:$色番号.$B$10];2;0)" office:value-type="float" office:value="4" calcext:value-type="float">
            <text:p>4</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航海</text:p>
          </table:table-cell>
          <table:table-cell table:formula="of:=IFERROR(VLOOKUP([.$Q35];[$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35];[$特性番号.$A$1:$特性番号.$B$8];2;0);0)" office:value-type="float" office:value="0" calcext:value-type="float">
            <text:p>0</text:p>
          </table:table-cell>
          <table:table-cell office:value-type="string" calcext:value-type="string">
            <text:p>航海 - アタッカーになったとき、自分の戦場のハイケイ1つを指定して発動できる。そのハイケイを手札に戻す。自分の戦場のイジンは、このターンの間「ダブルプレッシャー」を得る。</text:p>
          </table:table-cell>
          <table:table-cell table:style-name="ce8" office:value-type="string" calcext:value-type="string">
            <text:p>魔力化</text:p>
          </table:table-cell>
          <table:table-cell table:formula="of:=IFERROR(VLOOKUP([.$V35];[$遺業能力番号.$A$1:$遺業能力番号.$B$9];2;0);0)" office:value-type="float" office:value="1" calcext:value-type="float">
            <text:p>1</text:p>
          </table:table-cell>
          <table:table-cell office:value-type="string" calcext:value-type="string">
            <text:p>https://one-draw.jp/ijinden/cardlist/G01/card/G_008.png</text:p>
          </table:table-cell>
          <table:table-cell table:formula="of:=CONCATENATE([$JSON.$A$1];[.$C35];[$JSON.$B$1];[.$E35];[$JSON.$C$1];[.$F35];[$JSON.$D$1];IF(ISNA([.$S35]);&quot;null&quot;;&quot;&quot;&quot;&quot;&amp;[.$S35]&amp;&quot;&quot;&quot;&quot;);[$JSON.$E$1];[.$U35];[$JSON.$F$1];IF(ISNA([.$V35]);&quot;null&quot;;&quot;&quot;&quot;&quot;&amp;[.$V35]&amp;&quot;&quot;&quot;&quot;);[$JSON.$G$1];[.$X35];[$JSON.$H$1];[.$H35];[$JSON.$I$1];[.J35];[$JSON.$J$1];[.$L35];[$JSON.$K$1];[.$O35];[$JSON.$L$1];[.$N35];[$JSON.$M$1];[.$R35];[$JSON.$N$1];[.$T35];[$JSON.$O$1];[.$W35];[$JSON.$P$1];[.$A35];[$JSON.$Q$1];[.$B35];[$JSON.$R$1])" office:value-type="string" office:string-value="{&quot;id&quot;:&quot;G-8&quot;,&quot;name&quot;:&quot;最澄&quot;,&quot;kana&quot;:&quot;さいちょう&quot;,&quot;traitText&quot;:null,&quot;ruleText&quot;:&quot;航海 - アタッカーになったとき、自分の戦場のハイケイ1つを指定して発動できる。そのハイケイを手札に戻す。自分の戦場のイジンは、このターンの間「ダブルプレッシャー」を得る。&quot;,&quot;legacyText&quot;:&quot;魔力化&quot;,&quot;imageUrl&quot;:&quot;https://one-draw.jp/ijinden/cardlist/G01/card/G_008.png&quot;,&quot;expansion&quot;:12,&quot;rarity&quot;:1,&quot;type&quot;:1,&quot;level&quot;:8,&quot;color&quot;:4,&quot;term&quot;:1,&quot;trait&quot;:0,&quot;legacy&quot;:1,&quot;orderTable&quot;:34,&quot;orderDeck&quot;:221}," calcext:value-type="string">
            <text:p>{"id":"G-8","name":"最澄","kana":"さいちょう","traitText":null,"ruleText":"航海 - アタッカーになったとき、自分の戦場のハイケイ1つを指定して発動できる。そのハイケイを手札に戻す。自分の戦場のイジンは、このターンの間「ダブルプレッシャー」を得る。","legacyText":"魔力化","imageUrl":"https://one-draw.jp/ijinden/cardlist/G01/card/G_008.png","expansion":12,"rarity":1,"type":1,"level":8,"color":4,"term":1,"trait":0,"legacy":1,"orderTable":34,"orderDeck":221},</text:p>
          </table:table-cell>
          <table:table-cell table:number-columns-repeated="16347"/>
        </table:table-row>
        <table:table-row table:style-name="ro2">
          <table:table-cell office:value-type="float" office:value="35" calcext:value-type="float">
            <text:p>35</text:p>
          </table:table-cell>
          <table:table-cell office:value-type="float" office:value="263" calcext:value-type="float">
            <text:p>263</text:p>
          </table:table-cell>
          <table:table-cell office:value-type="string" calcext:value-type="string">
            <text:p>G-9</text:p>
          </table:table-cell>
          <table:table-cell office:value-type="float" office:value="9" calcext:value-type="float">
            <text:p>9</text:p>
          </table:table-cell>
          <table:table-cell office:value-type="string" calcext:value-type="string">
            <text:p>阿弥陀堂</text:p>
          </table:table-cell>
          <table:table-cell office:value-type="string" calcext:value-type="string">
            <text:p>あみだどう</text:p>
          </table:table-cell>
          <table:table-cell office:value-type="string" calcext:value-type="string">
            <text:p>日本の大天才デッキ</text:p>
          </table:table-cell>
          <table:table-cell table:formula="of:=VLOOKUP([.G36];[$収録番号.$A$1:$収録番号.$B$9];2;0)" office:value-type="float" office:value="12" calcext:value-type="float">
            <text:p>12</text:p>
          </table:table-cell>
          <table:table-cell office:value-type="string" calcext:value-type="string">
            <text:p>N</text:p>
          </table:table-cell>
          <table:table-cell table:formula="of:=VLOOKUP([.I36];[$レアリティ番号.$A$1:$レアリティ番号.$B$4];2;0)" office:value-type="float" office:value="1" calcext:value-type="float">
            <text:p>1</text:p>
          </table:table-cell>
          <table:table-cell office:value-type="string" calcext:value-type="string">
            <text:p>ハイケイ</text:p>
          </table:table-cell>
          <table:table-cell table:formula="of:=VLOOKUP([.K36];[$種類番号.$A$1:$種類番号.$B$4];2;0)" office:value-type="float" office:value="2" calcext:value-type="float">
            <text:p>2</text:p>
          </table:table-cell>
          <table:table-cell office:value-type="string" calcext:value-type="string">
            <text:p>緑</text:p>
          </table:table-cell>
          <table:table-cell table:formula="of:=VLOOKUP([.M36];[$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特性番号.$A$1:$特性番号.$B$8];2;0);0)" office:value-type="float" office:value="0" calcext:value-type="float">
            <text:p>0</text:p>
          </table:table-cell>
          <table:table-cell office:value-type="string" calcext:value-type="string">
            <text:p>自分のメインフェイズが開始したとき、自分の戦場のカード1つか、自分の魔力ゾーンのカード1つを指定して発動できる。そのカードを手札に戻す。</text:p>
          </table:table-cell>
          <table:table-cell table:style-name="ce8" table:formula="of:=NA()" office:value-type="string" office:string-value="" calcext:value-type="error">
            <text:p>#N/A</text:p>
          </table:table-cell>
          <table:table-cell table:formula="of:=IFERROR(VLOOKUP([.$V36];[$遺業能力番号.$A$1:$遺業能力番号.$B$9];2;0);0)" office:value-type="float" office:value="0" calcext:value-type="float">
            <text:p>0</text:p>
          </table:table-cell>
          <table:table-cell office:value-type="string" calcext:value-type="string">
            <text:p>https://one-draw.jp/ijinden/cardlist/G01/card/G_009.png</text:p>
          </table:table-cell>
          <table:table-cell table:formula="of:=CONCATENATE([$JSON.$A$1];[.$C36];[$JSON.$B$1];[.$E36];[$JSON.$C$1];[.$F36];[$JSON.$D$1];IF(ISNA([.$S36]);&quot;null&quot;;&quot;&quot;&quot;&quot;&amp;[.$S36]&amp;&quot;&quot;&quot;&quot;);[$JSON.$E$1];[.$U36];[$JSON.$F$1];IF(ISNA([.$V36]);&quot;null&quot;;&quot;&quot;&quot;&quot;&amp;[.$V36]&amp;&quot;&quot;&quot;&quot;);[$JSON.$G$1];[.$X36];[$JSON.$H$1];[.$H36];[$JSON.$I$1];[.J36];[$JSON.$J$1];[.$L36];[$JSON.$K$1];[.$O36];[$JSON.$L$1];[.$N36];[$JSON.$M$1];[.$R36];[$JSON.$N$1];[.$T36];[$JSON.$O$1];[.$W36];[$JSON.$P$1];[.$A36];[$JSON.$Q$1];[.$B36];[$JSON.$R$1])" office:value-type="string" office:string-value="{&quot;id&quot;:&quot;G-9&quot;,&quot;name&quot;:&quot;阿弥陀堂&quot;,&quot;kana&quot;:&quot;あみだどう&quot;,&quot;traitText&quot;:null,&quot;ruleText&quot;:&quot;自分のメインフェイズが開始したとき、自分の戦場のカード1つか、自分の魔力ゾーンのカード1つを指定して発動できる。そのカードを手札に戻す。&quot;,&quot;legacyText&quot;:null,&quot;imageUrl&quot;:&quot;https://one-draw.jp/ijinden/cardlist/G01/card/G_009.png&quot;,&quot;expansion&quot;:12,&quot;rarity&quot;:1,&quot;type&quot;:2,&quot;level&quot;:4,&quot;color&quot;:4,&quot;term&quot;:0,&quot;trait&quot;:0,&quot;legacy&quot;:0,&quot;orderTable&quot;:35,&quot;orderDeck&quot;:263}," calcext:value-type="string">
            <text:p>{"id":"G-9","name":"阿弥陀堂","kana":"あみだどう","traitText":null,"ruleText":"自分のメインフェイズが開始したとき、自分の戦場のカード1つか、自分の魔力ゾーンのカード1つを指定して発動できる。そのカードを手札に戻す。","legacyText":null,"imageUrl":"https://one-draw.jp/ijinden/cardlist/G01/card/G_009.png","expansion":12,"rarity":1,"type":2,"level":4,"color":4,"term":0,"trait":0,"legacy":0,"orderTable":35,"orderDeck":263},</text:p>
          </table:table-cell>
          <table:table-cell table:number-columns-repeated="16347"/>
        </table:table-row>
        <table:table-row table:style-name="ro2">
          <table:table-cell office:value-type="float" office:value="36" calcext:value-type="float">
            <text:p>36</text:p>
          </table:table-cell>
          <table:table-cell office:value-type="float" office:value="276" calcext:value-type="float">
            <text:p>276</text:p>
          </table:table-cell>
          <table:table-cell office:value-type="string" calcext:value-type="string">
            <text:p>G-10</text:p>
          </table:table-cell>
          <table:table-cell office:value-type="float" office:value="10" calcext:value-type="float">
            <text:p>10</text:p>
          </table:table-cell>
          <table:table-cell office:value-type="string" calcext:value-type="string">
            <text:p>毘盧遮那仏像</text:p>
          </table:table-cell>
          <table:table-cell office:value-type="string" calcext:value-type="string">
            <text:p>びるしゃなぶつぞう</text:p>
          </table:table-cell>
          <table:table-cell office:value-type="string" calcext:value-type="string">
            <text:p>日本の大天才デッキ</text:p>
          </table:table-cell>
          <table:table-cell table:formula="of:=VLOOKUP([.G37];[$収録番号.$A$1:$収録番号.$B$9];2;0)" office:value-type="float" office:value="12" calcext:value-type="float">
            <text:p>12</text:p>
          </table:table-cell>
          <table:table-cell office:value-type="string" calcext:value-type="string">
            <text:p>N</text:p>
          </table:table-cell>
          <table:table-cell table:formula="of:=VLOOKUP([.I37];[$レアリティ番号.$A$1:$レアリティ番号.$B$4];2;0)" office:value-type="float" office:value="1" calcext:value-type="float">
            <text:p>1</text:p>
          </table:table-cell>
          <table:table-cell office:value-type="string" calcext:value-type="string">
            <text:p>ハイケイ</text:p>
          </table:table-cell>
          <table:table-cell table:formula="of:=VLOOKUP([.K37];[$種類番号.$A$1:$種類番号.$B$4];2;0)" office:value-type="float" office:value="2" calcext:value-type="float">
            <text:p>2</text:p>
          </table:table-cell>
          <table:table-cell office:value-type="string" calcext:value-type="string">
            <text:p>緑</text:p>
          </table:table-cell>
          <table:table-cell table:formula="of:=VLOOKUP([.M37];[$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7];[$特性番号.$A$1:$特性番号.$B$8];2;0);0)" office:value-type="float" office:value="0" calcext:value-type="float">
            <text:p>0</text:p>
          </table:table-cell>
          <table:table-cell office:value-type="string" calcext:value-type="string">
            <text:p>これが戦場にある間、自分の戦場のイジンは「パワー+1000」を得る。¶自分のエンドフェイズが開始したとき、自分の戦場のカードすべてを起こす。</text:p>
          </table:table-cell>
          <table:table-cell table:style-name="ce8" office:value-type="string" calcext:value-type="string">
            <text:p>魔力化</text:p>
          </table:table-cell>
          <table:table-cell table:formula="of:=IFERROR(VLOOKUP([.$V37];[$遺業能力番号.$A$1:$遺業能力番号.$B$9];2;0);0)" office:value-type="float" office:value="1" calcext:value-type="float">
            <text:p>1</text:p>
          </table:table-cell>
          <table:table-cell office:value-type="string" calcext:value-type="string">
            <text:p>https://one-draw.jp/ijinden/cardlist/G01/card/G_010.png</text:p>
          </table:table-cell>
          <table:table-cell table:formula="of:=CONCATENATE([$JSON.$A$1];[.$C37];[$JSON.$B$1];[.$E37];[$JSON.$C$1];[.$F37];[$JSON.$D$1];IF(ISNA([.$S37]);&quot;null&quot;;&quot;&quot;&quot;&quot;&amp;[.$S37]&amp;&quot;&quot;&quot;&quot;);[$JSON.$E$1];[.$U37];[$JSON.$F$1];IF(ISNA([.$V37]);&quot;null&quot;;&quot;&quot;&quot;&quot;&amp;[.$V37]&amp;&quot;&quot;&quot;&quot;);[$JSON.$G$1];[.$X37];[$JSON.$H$1];[.$H37];[$JSON.$I$1];[.J37];[$JSON.$J$1];[.$L37];[$JSON.$K$1];[.$O37];[$JSON.$L$1];[.$N37];[$JSON.$M$1];[.$R37];[$JSON.$N$1];[.$T37];[$JSON.$O$1];[.$W37];[$JSON.$P$1];[.$A37];[$JSON.$Q$1];[.$B37];[$JSON.$R$1])" office:value-type="string" office:string-value="{&quot;id&quot;:&quot;G-10&quot;,&quot;name&quot;:&quot;毘盧遮那仏像&quot;,&quot;kana&quot;:&quot;びるしゃなぶつぞう&quot;,&quot;traitText&quot;:null,&quot;ruleText&quot;:&quot;これが戦場にある間、自分の戦場のイジンは「パワー+1000」を得る。¶自分のエンドフェイズが開始したとき、自分の戦場のカードすべてを起こす。&quot;,&quot;legacyText&quot;:&quot;魔力化&quot;,&quot;imageUrl&quot;:&quot;https://one-draw.jp/ijinden/cardlist/G01/card/G_010.png&quot;,&quot;expansion&quot;:12,&quot;rarity&quot;:1,&quot;type&quot;:2,&quot;level&quot;:6,&quot;color&quot;:4,&quot;term&quot;:0,&quot;trait&quot;:0,&quot;legacy&quot;:1,&quot;orderTable&quot;:36,&quot;orderDeck&quot;:276}," calcext:value-type="string">
            <text:p>{"id":"G-10","name":"毘盧遮那仏像","kana":"びるしゃなぶつぞう","traitText":null,"ruleText":"これが戦場にある間、自分の戦場のイジンは「パワー+1000」を得る。¶自分のエンドフェイズが開始したとき、自分の戦場のカードすべてを起こす。","legacyText":"魔力化","imageUrl":"https://one-draw.jp/ijinden/cardlist/G01/card/G_010.png","expansion":12,"rarity":1,"type":2,"level":6,"color":4,"term":0,"trait":0,"legacy":1,"orderTable":36,"orderDeck":276},</text:p>
          </table:table-cell>
          <table:table-cell table:number-columns-repeated="16347"/>
        </table:table-row>
        <table:table-row table:style-name="ro2">
          <table:table-cell office:value-type="float" office:value="37" calcext:value-type="float">
            <text:p>37</text:p>
          </table:table-cell>
          <table:table-cell office:value-type="float" office:value="309" calcext:value-type="float">
            <text:p>309</text:p>
          </table:table-cell>
          <table:table-cell office:value-type="string" calcext:value-type="string">
            <text:p>G-11</text:p>
          </table:table-cell>
          <table:table-cell office:value-type="float" office:value="11" calcext:value-type="float">
            <text:p>11</text:p>
          </table:table-cell>
          <table:table-cell office:value-type="string" calcext:value-type="string">
            <text:p>グロウ</text:p>
          </table:table-cell>
          <table:table-cell office:value-type="string" calcext:value-type="string">
            <text:p>ぐろう</text:p>
          </table:table-cell>
          <table:table-cell office:value-type="string" calcext:value-type="string">
            <text:p>日本の大天才デッキ</text:p>
          </table:table-cell>
          <table:table-cell table:formula="of:=VLOOKUP([.G38];[$収録番号.$A$1:$収録番号.$B$9];2;0)" office:value-type="float" office:value="12" calcext:value-type="float">
            <text:p>12</text:p>
          </table:table-cell>
          <table:table-cell office:value-type="string" calcext:value-type="string">
            <text:p>N</text:p>
          </table:table-cell>
          <table:table-cell table:formula="of:=VLOOKUP([.I38];[$レアリティ番号.$A$1:$レアリティ番号.$B$4];2;0)" office:value-type="float" office:value="1" calcext:value-type="float">
            <text:p>1</text:p>
          </table:table-cell>
          <table:table-cell office:value-type="string" calcext:value-type="string">
            <text:p>マホウ</text:p>
          </table:table-cell>
          <table:table-cell table:formula="of:=VLOOKUP([.K38];[$種類番号.$A$1:$種類番号.$B$4];2;0)" office:value-type="float" office:value="3" calcext:value-type="float">
            <text:p>3</text:p>
          </table:table-cell>
          <table:table-cell office:value-type="string" calcext:value-type="string">
            <text:p>緑</text:p>
          </table:table-cell>
          <table:table-cell table:formula="of:=VLOOKUP([.M38];[$色番号.$A$1:$色番号.$B$10];2;0)"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3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特性番号.$A$1:$特性番号.$B$8];2;0);0)" office:value-type="float" office:value="0" calcext:value-type="float">
            <text:p>0</text:p>
          </table:table-cell>
          <table:table-cell office:value-type="string" calcext:value-type="string">
            <text:p>自分の山札の上から1枚を、裏のまま魔力ゾーンに置く。</text:p>
          </table:table-cell>
          <table:table-cell table:style-name="ce8" office:value-type="string" calcext:value-type="string">
            <text:p>冥府発動</text:p>
          </table:table-cell>
          <table:table-cell table:formula="of:=IFERROR(VLOOKUP([.$V38];[$遺業能力番号.$A$1:$遺業能力番号.$B$9];2;0);0)" office:value-type="float" office:value="2" calcext:value-type="float">
            <text:p>2</text:p>
          </table:table-cell>
          <table:table-cell office:value-type="string" calcext:value-type="string">
            <text:p>https://one-draw.jp/ijinden/cardlist/G01/card/G_011.png</text:p>
          </table:table-cell>
          <table:table-cell table:formula="of:=CONCATENATE([$JSON.$A$1];[.$C38];[$JSON.$B$1];[.$E38];[$JSON.$C$1];[.$F38];[$JSON.$D$1];IF(ISNA([.$S38]);&quot;null&quot;;&quot;&quot;&quot;&quot;&amp;[.$S38]&amp;&quot;&quot;&quot;&quot;);[$JSON.$E$1];[.$U38];[$JSON.$F$1];IF(ISNA([.$V38]);&quot;null&quot;;&quot;&quot;&quot;&quot;&amp;[.$V38]&amp;&quot;&quot;&quot;&quot;);[$JSON.$G$1];[.$X38];[$JSON.$H$1];[.$H38];[$JSON.$I$1];[.J38];[$JSON.$J$1];[.$L38];[$JSON.$K$1];[.$O38];[$JSON.$L$1];[.$N38];[$JSON.$M$1];[.$R38];[$JSON.$N$1];[.$T38];[$JSON.$O$1];[.$W38];[$JSON.$P$1];[.$A38];[$JSON.$Q$1];[.$B38];[$JSON.$R$1])" office:value-type="string" office:string-value="{&quot;id&quot;:&quot;G-11&quot;,&quot;name&quot;:&quot;グロウ&quot;,&quot;kana&quot;:&quot;ぐろう&quot;,&quot;traitText&quot;:null,&quot;ruleText&quot;:&quot;自分の山札の上から1枚を、裏のまま魔力ゾーンに置く。&quot;,&quot;legacyText&quot;:&quot;冥府発動&quot;,&quot;imageUrl&quot;:&quot;https://one-draw.jp/ijinden/cardlist/G01/card/G_011.png&quot;,&quot;expansion&quot;:12,&quot;rarity&quot;:1,&quot;type&quot;:3,&quot;level&quot;:3,&quot;color&quot;:4,&quot;term&quot;:0,&quot;trait&quot;:0,&quot;legacy&quot;:2,&quot;orderTable&quot;:37,&quot;orderDeck&quot;:309}," calcext:value-type="string">
            <text:p>{"id":"G-11","name":"グロウ","kana":"ぐろう","traitText":null,"ruleText":"自分の山札の上から1枚を、裏のまま魔力ゾーンに置く。","legacyText":"冥府発動","imageUrl":"https://one-draw.jp/ijinden/cardlist/G01/card/G_011.png","expansion":12,"rarity":1,"type":3,"level":3,"color":4,"term":0,"trait":0,"legacy":2,"orderTable":37,"orderDeck":309},</text:p>
          </table:table-cell>
          <table:table-cell table:number-columns-repeated="16347"/>
        </table:table-row>
        <table:table-row table:style-name="ro2">
          <table:table-cell office:value-type="float" office:value="38" calcext:value-type="float">
            <text:p>38</text:p>
          </table:table-cell>
          <table:table-cell office:value-type="float" office:value="328" calcext:value-type="float">
            <text:p>328</text:p>
          </table:table-cell>
          <table:table-cell office:value-type="string" calcext:value-type="string">
            <text:p>G-12</text:p>
          </table:table-cell>
          <table:table-cell office:value-type="float" office:value="12" calcext:value-type="float">
            <text:p>12</text:p>
          </table:table-cell>
          <table:table-cell office:value-type="string" calcext:value-type="string">
            <text:p>ギャザリング</text:p>
          </table:table-cell>
          <table:table-cell office:value-type="string" calcext:value-type="string">
            <text:p>ぎゃざりんぐ</text:p>
          </table:table-cell>
          <table:table-cell office:value-type="string" calcext:value-type="string">
            <text:p>日本の大天才デッキ</text:p>
          </table:table-cell>
          <table:table-cell table:formula="of:=VLOOKUP([.G39];[$収録番号.$A$1:$収録番号.$B$9];2;0)" office:value-type="float" office:value="12" calcext:value-type="float">
            <text:p>12</text:p>
          </table:table-cell>
          <table:table-cell office:value-type="string" calcext:value-type="string">
            <text:p>N</text:p>
          </table:table-cell>
          <table:table-cell table:formula="of:=VLOOKUP([.I39];[$レアリティ番号.$A$1:$レアリティ番号.$B$4];2;0)" office:value-type="float" office:value="1" calcext:value-type="float">
            <text:p>1</text:p>
          </table:table-cell>
          <table:table-cell office:value-type="string" calcext:value-type="string">
            <text:p>マホウ</text:p>
          </table:table-cell>
          <table:table-cell table:formula="of:=VLOOKUP([.K39];[$種類番号.$A$1:$種類番号.$B$4];2;0)" office:value-type="float" office:value="3" calcext:value-type="float">
            <text:p>3</text:p>
          </table:table-cell>
          <table:table-cell office:value-type="string" calcext:value-type="string">
            <text:p>緑</text:p>
          </table:table-cell>
          <table:table-cell table:formula="of:=VLOOKUP([.M39];[$色番号.$A$1:$色番号.$B$10];2;0)"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3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9];[$特性番号.$A$1:$特性番号.$B$8];2;0);0)" office:value-type="float" office:value="0" calcext:value-type="float">
            <text:p>0</text:p>
          </table:table-cell>
          <table:table-cell office:value-type="string" calcext:value-type="string">
            <text:p>自分の戦場のガーディアンすべてを手札に戻す。自分の山札の上から2枚をガーディアンにして戦場に置く。</text:p>
          </table:table-cell>
          <table:table-cell table:style-name="ce8" office:value-type="string" calcext:value-type="string">
            <text:p>魔力化</text:p>
          </table:table-cell>
          <table:table-cell table:formula="of:=IFERROR(VLOOKUP([.$V39];[$遺業能力番号.$A$1:$遺業能力番号.$B$9];2;0);0)" office:value-type="float" office:value="1" calcext:value-type="float">
            <text:p>1</text:p>
          </table:table-cell>
          <table:table-cell office:value-type="string" calcext:value-type="string">
            <text:p>https://one-draw.jp/ijinden/cardlist/G01/card/G_012.png</text:p>
          </table:table-cell>
          <table:table-cell table:formula="of:=CONCATENATE([$JSON.$A$1];[.$C39];[$JSON.$B$1];[.$E39];[$JSON.$C$1];[.$F39];[$JSON.$D$1];IF(ISNA([.$S39]);&quot;null&quot;;&quot;&quot;&quot;&quot;&amp;[.$S39]&amp;&quot;&quot;&quot;&quot;);[$JSON.$E$1];[.$U39];[$JSON.$F$1];IF(ISNA([.$V39]);&quot;null&quot;;&quot;&quot;&quot;&quot;&amp;[.$V39]&amp;&quot;&quot;&quot;&quot;);[$JSON.$G$1];[.$X39];[$JSON.$H$1];[.$H39];[$JSON.$I$1];[.J39];[$JSON.$J$1];[.$L39];[$JSON.$K$1];[.$O39];[$JSON.$L$1];[.$N39];[$JSON.$M$1];[.$R39];[$JSON.$N$1];[.$T39];[$JSON.$O$1];[.$W39];[$JSON.$P$1];[.$A39];[$JSON.$Q$1];[.$B39];[$JSON.$R$1])" office:value-type="string" office:string-value="{&quot;id&quot;:&quot;G-12&quot;,&quot;name&quot;:&quot;ギャザリング&quot;,&quot;kana&quot;:&quot;ぎゃざりんぐ&quot;,&quot;traitText&quot;:null,&quot;ruleText&quot;:&quot;自分の戦場のガーディアンすべてを手札に戻す。自分の山札の上から2枚をガーディアンにして戦場に置く。&quot;,&quot;legacyText&quot;:&quot;魔力化&quot;,&quot;imageUrl&quot;:&quot;https://one-draw.jp/ijinden/cardlist/G01/card/G_012.png&quot;,&quot;expansion&quot;:12,&quot;rarity&quot;:1,&quot;type&quot;:3,&quot;level&quot;:5,&quot;color&quot;:4,&quot;term&quot;:0,&quot;trait&quot;:0,&quot;legacy&quot;:1,&quot;orderTable&quot;:38,&quot;orderDeck&quot;:328}," calcext:value-type="string">
            <text:p>{"id":"G-12","name":"ギャザリング","kana":"ぎゃざりんぐ","traitText":null,"ruleText":"自分の戦場のガーディアンすべてを手札に戻す。自分の山札の上から2枚をガーディアンにして戦場に置く。","legacyText":"魔力化","imageUrl":"https://one-draw.jp/ijinden/cardlist/G01/card/G_012.png","expansion":12,"rarity":1,"type":3,"level":5,"color":4,"term":0,"trait":0,"legacy":1,"orderTable":38,"orderDeck":328},</text:p>
          </table:table-cell>
          <table:table-cell table:number-columns-repeated="16347"/>
        </table:table-row>
        <table:table-row table:style-name="ro2">
          <table:table-cell office:value-type="float" office:value="39" calcext:value-type="float">
            <text:p>39</text:p>
          </table:table-cell>
          <table:table-cell office:value-type="float" office:value="355" calcext:value-type="float">
            <text:p>355</text:p>
          </table:table-cell>
          <table:table-cell office:value-type="string" calcext:value-type="string">
            <text:p>G-13</text:p>
          </table:table-cell>
          <table:table-cell office:value-type="float" office:value="13" calcext:value-type="float">
            <text:p>13</text:p>
          </table:table-cell>
          <table:table-cell office:value-type="string" calcext:value-type="string">
            <text:p>グリーンストーン</text:p>
          </table:table-cell>
          <table:table-cell office:value-type="string" calcext:value-type="string">
            <text:p>ぐりーんすとーん</text:p>
          </table:table-cell>
          <table:table-cell office:value-type="string" calcext:value-type="string">
            <text:p>日本の大天才デッキ</text:p>
          </table:table-cell>
          <table:table-cell table:formula="of:=VLOOKUP([.G40];[$収録番号.$A$1:$収録番号.$B$9];2;0)" office:value-type="float" office:value="12" calcext:value-type="float">
            <text:p>12</text:p>
          </table:table-cell>
          <table:table-cell office:value-type="string" calcext:value-type="string">
            <text:p>N</text:p>
          </table:table-cell>
          <table:table-cell table:formula="of:=VLOOKUP([.I40];[$レアリティ番号.$A$1:$レアリティ番号.$B$4];2;0)" office:value-type="float" office:value="1" calcext:value-type="float">
            <text:p>1</text:p>
          </table:table-cell>
          <table:table-cell office:value-type="string" calcext:value-type="string">
            <text:p>マリョク</text:p>
          </table:table-cell>
          <table:table-cell table:formula="of:=VLOOKUP([.K40];[$種類番号.$A$1:$種類番号.$B$4];2;0)" office:value-type="float" office:value="4" calcext:value-type="float">
            <text:p>4</text:p>
          </table:table-cell>
          <table:table-cell office:value-type="string" calcext:value-type="string">
            <text:p>緑</text:p>
          </table:table-cell>
          <table:table-cell table:formula="of:=VLOOKUP([.M40];[$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40];[$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V40];[$遺業能力番号.$A$1:$遺業能力番号.$B$9];2;0);0)" office:value-type="float" office:value="3" calcext:value-type="float">
            <text:p>3</text:p>
          </table:table-cell>
          <table:table-cell office:value-type="string" calcext:value-type="string">
            <text:p>https://one-draw.jp/ijinden/cardlist/G01/card/G_013.png</text:p>
          </table:table-cell>
          <table:table-cell table:formula="of:=CONCATENATE([$JSON.$A$1];[.$C40];[$JSON.$B$1];[.$E40];[$JSON.$C$1];[.$F40];[$JSON.$D$1];IF(ISNA([.$S40]);&quot;null&quot;;&quot;&quot;&quot;&quot;&amp;[.$S40]&amp;&quot;&quot;&quot;&quot;);[$JSON.$E$1];[.$U40];[$JSON.$F$1];IF(ISNA([.$V40]);&quot;null&quot;;&quot;&quot;&quot;&quot;&amp;[.$V40]&amp;&quot;&quot;&quot;&quot;);[$JSON.$G$1];[.$X40];[$JSON.$H$1];[.$H40];[$JSON.$I$1];[.J40];[$JSON.$J$1];[.$L40];[$JSON.$K$1];[.$O40];[$JSON.$L$1];[.$N40];[$JSON.$M$1];[.$R40];[$JSON.$N$1];[.$T40];[$JSON.$O$1];[.$W40];[$JSON.$P$1];[.$A40];[$JSON.$Q$1];[.$B40];[$JSON.$R$1])" office:value-type="string" office:string-value="{&quot;id&quot;:&quot;G-13&quot;,&quot;name&quot;:&quot;グリーンストーン&quot;,&quot;kana&quot;:&quot;ぐりーんすとーん&quot;,&quot;traitText&quot;:null,&quot;ruleText&quot;:&quot;※デッキに何枚でも入れてよい。&quot;,&quot;legacyText&quot;:&quot;復元&quot;,&quot;imageUrl&quot;:&quot;https://one-draw.jp/ijinden/cardlist/G01/card/G_013.png&quot;,&quot;expansion&quot;:12,&quot;rarity&quot;:1,&quot;type&quot;:4,&quot;level&quot;:1,&quot;color&quot;:4,&quot;term&quot;:0,&quot;trait&quot;:0,&quot;legacy&quot;:3,&quot;orderTable&quot;:39,&quot;orderDeck&quot;:355}," calcext:value-type="string">
            <text:p>{"id":"G-13","name":"グリーンストーン","kana":"ぐりーんすとーん","traitText":null,"ruleText":"※デッキに何枚でも入れてよい。","legacyText":"復元","imageUrl":"https://one-draw.jp/ijinden/cardlist/G01/card/G_013.png","expansion":12,"rarity":1,"type":4,"level":1,"color":4,"term":0,"trait":0,"legacy":3,"orderTable":39,"orderDeck":355},</text:p>
          </table:table-cell>
          <table:table-cell table:number-columns-repeated="16347"/>
        </table:table-row>
        <table:table-row table:style-name="ro2">
          <table:table-cell office:value-type="float" office:value="40" calcext:value-type="float">
            <text:p>40</text:p>
          </table:table-cell>
          <table:table-cell office:value-type="float" office:value="107" calcext:value-type="float">
            <text:p>107</text:p>
          </table:table-cell>
          <table:table-cell office:value-type="string" calcext:value-type="string">
            <text:p>1-1</text:p>
          </table:table-cell>
          <table:table-cell office:value-type="float" office:value="1" calcext:value-type="float">
            <text:p>1</text:p>
          </table:table-cell>
          <table:table-cell office:value-type="string" calcext:value-type="string">
            <text:p>織田信長</text:p>
          </table:table-cell>
          <table:table-cell office:value-type="string" calcext:value-type="string">
            <text:p>おだのぶなが</text:p>
          </table:table-cell>
          <table:table-cell office:value-type="string" calcext:value-type="string">
            <text:p>第１弾ブースターパック</text:p>
          </table:table-cell>
          <table:table-cell table:formula="of:=VLOOKUP([.G41];[$収録番号.$A$1:$収録番号.$B$9];2;0)" office:value-type="float" office:value="15" calcext:value-type="float">
            <text:p>15</text:p>
          </table:table-cell>
          <table:table-cell office:value-type="string" calcext:value-type="string">
            <text:p>SR</text:p>
          </table:table-cell>
          <table:table-cell table:formula="of:=VLOOKUP([.I41];[$レアリティ番号.$A$1:$レアリティ番号.$B$4];2;0)" office:value-type="float" office:value="4" calcext:value-type="float">
            <text:p>4</text:p>
          </table:table-cell>
          <table:table-cell office:value-type="string" calcext:value-type="string">
            <text:p>イジン</text:p>
          </table:table-cell>
          <table:table-cell table:formula="of:=VLOOKUP([.K41];[$種類番号.$A$1:$種類番号.$B$4];2;0)" office:value-type="float" office:value="1" calcext:value-type="float">
            <text:p>1</text:p>
          </table:table-cell>
          <table:table-cell office:value-type="string" calcext:value-type="string">
            <text:p>赤</text:p>
          </table:table-cell>
          <table:table-cell table:formula="of:=VLOOKUP([.M41];[$色番号.$A$1:$色番号.$B$5];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41];[$特性番号.$A$1:$特性番号.$B$8];2;0);0)" office:value-type="float" office:value="0" calcext:value-type="float">
            <text:p>0</text:p>
          </table:table-cell>
          <table:table-cell office:value-type="string" calcext:value-type="string">
            <text:p>即応 ダブルプレッシャー¶相手の戦場のガーディアンが1体以下の間「ダブルプレッシャー」を失い、「特性：剣術」を得る。¶自分のエンドフェイズが開始したとき、これが寝ているなら発動する。これを破壊する。</text:p>
          </table:table-cell>
          <table:table-cell table:style-name="ce8" table:formula="of:=NA()" office:value-type="string" office:string-value="" calcext:value-type="error">
            <text:p>#N/A</text:p>
          </table:table-cell>
          <table:table-cell table:formula="of:=IFERROR(VLOOKUP([.$V41];[$遺業能力番号.$A$1:$遺業能力番号.$B$9];2;0);0)" office:value-type="float" office:value="0" calcext:value-type="float">
            <text:p>0</text:p>
          </table:table-cell>
          <table:table-cell office:value-type="string" calcext:value-type="string">
            <text:p>https://one-draw.jp/ijinden/cardlist/001/card/01_001.png</text:p>
          </table:table-cell>
          <table:table-cell table:formula="of:=CONCATENATE([$JSON.$A$1];[.$C41];[$JSON.$B$1];[.$E41];[$JSON.$C$1];[.$F41];[$JSON.$D$1];IF(ISNA([.$S41]);&quot;null&quot;;&quot;&quot;&quot;&quot;&amp;[.$S41]&amp;&quot;&quot;&quot;&quot;);[$JSON.$E$1];[.$U41];[$JSON.$F$1];IF(ISNA([.$V41]);&quot;null&quot;;&quot;&quot;&quot;&quot;&amp;[.$V41]&amp;&quot;&quot;&quot;&quot;);[$JSON.$G$1];[.$X41];[$JSON.$H$1];[.$H41];[$JSON.$I$1];[.J41];[$JSON.$J$1];[.$L41];[$JSON.$K$1];[.$O41];[$JSON.$L$1];[.$N41];[$JSON.$M$1];[.$R41];[$JSON.$N$1];[.$T41];[$JSON.$O$1];[.$W41];[$JSON.$P$1];[.$A41];[$JSON.$Q$1];[.$B41];[$JSON.$R$1])" office:value-type="string" office:string-value="{&quot;id&quot;:&quot;1-1&quot;,&quot;name&quot;:&quot;織田信長&quot;,&quot;kana&quot;:&quot;おだのぶなが&quot;,&quot;traitText&quot;:null,&quot;ruleText&quot;:&quot;即応 ダブルプレッシャー¶相手の戦場のガーディアンが1体以下の間「ダブルプレッシャー」を失い、「特性：剣術」を得る。¶自分のエンドフェイズが開始したとき、これが寝ているなら発動する。これを破壊する。&quot;,&quot;legacyText&quot;:null,&quot;imageUrl&quot;:&quot;https://one-draw.jp/ijinden/cardlist/001/card/01_001.png&quot;,&quot;expansion&quot;:15,&quot;rarity&quot;:4,&quot;type&quot;:1,&quot;level&quot;:4,&quot;color&quot;:1,&quot;term&quot;:0,&quot;trait&quot;:0,&quot;legacy&quot;:0,&quot;orderTable&quot;:40,&quot;orderDeck&quot;:107}," calcext:value-type="string">
            <text:p>{"id":"1-1","name":"織田信長","kana":"おだのぶなが","traitText":null,"ruleText":"即応 ダブルプレッシャー¶相手の戦場のガーディアンが1体以下の間「ダブルプレッシャー」を失い、「特性：剣術」を得る。¶自分のエンドフェイズが開始したとき、これが寝ているなら発動する。これを破壊する。","legacyText":null,"imageUrl":"https://one-draw.jp/ijinden/cardlist/001/card/01_001.png","expansion":15,"rarity":4,"type":1,"level":4,"color":1,"term":0,"trait":0,"legacy":0,"orderTable":40,"orderDeck":107},</text:p>
          </table:table-cell>
          <table:table-cell table:number-columns-repeated="16347"/>
        </table:table-row>
        <table:table-row table:style-name="ro2">
          <table:table-cell office:value-type="float" office:value="41" calcext:value-type="float">
            <text:p>41</text:p>
          </table:table-cell>
          <table:table-cell office:value-type="float" office:value="145" calcext:value-type="float">
            <text:p>145</text:p>
          </table:table-cell>
          <table:table-cell office:value-type="string" calcext:value-type="string">
            <text:p>1-2</text:p>
          </table:table-cell>
          <table:table-cell office:value-type="float" office:value="2" calcext:value-type="float">
            <text:p>2</text:p>
          </table:table-cell>
          <table:table-cell office:value-type="string" calcext:value-type="string">
            <text:p>クレオパトラ</text:p>
          </table:table-cell>
          <table:table-cell office:value-type="string" calcext:value-type="string">
            <text:p>くれおぱとら</text:p>
          </table:table-cell>
          <table:table-cell office:value-type="string" calcext:value-type="string">
            <text:p>第１弾ブースターパック</text:p>
          </table:table-cell>
          <table:table-cell table:formula="of:=VLOOKUP([.G42];[$収録番号.$A$1:$収録番号.$B$9];2;0)" office:value-type="float" office:value="15" calcext:value-type="float">
            <text:p>15</text:p>
          </table:table-cell>
          <table:table-cell office:value-type="string" calcext:value-type="string">
            <text:p>SR</text:p>
          </table:table-cell>
          <table:table-cell table:formula="of:=VLOOKUP([.I42];[$レアリティ番号.$A$1:$レアリティ番号.$B$4];2;0)" office:value-type="float" office:value="4" calcext:value-type="float">
            <text:p>4</text:p>
          </table:table-cell>
          <table:table-cell office:value-type="string" calcext:value-type="string">
            <text:p>イジン</text:p>
          </table:table-cell>
          <table:table-cell table:formula="of:=VLOOKUP([.K42];[$種類番号.$A$1:$種類番号.$B$4];2;0)" office:value-type="float" office:value="1" calcext:value-type="float">
            <text:p>1</text:p>
          </table:table-cell>
          <table:table-cell office:value-type="string" calcext:value-type="string">
            <text:p>赤</text:p>
          </table:table-cell>
          <table:table-cell table:formula="of:=VLOOKUP([.M42];[$色番号.$A$1:$色番号.$B$5];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42];[$特性番号.$A$1:$特性番号.$B$8];2;0);0)" office:value-type="float" office:value="0" calcext:value-type="float">
            <text:p>0</text:p>
          </table:table-cell>
          <table:table-cell office:value-type="string" calcext:value-type="string">
            <text:p>戦場に置かれたときに発動できる。戦場のハイケイすべてを破壊する。¶ハイケイが破壊されるたび、1ドローする。</text:p>
          </table:table-cell>
          <table:table-cell table:style-name="ce8" office:value-type="string" calcext:value-type="string">
            <text:p>1ドローする</text:p>
          </table:table-cell>
          <table:table-cell table:formula="of:=IFERROR(VLOOKUP([.$V42];[$遺業能力番号.$A$1:$遺業能力番号.$B$9];2;0);0)" office:value-type="float" office:value="4" calcext:value-type="float">
            <text:p>4</text:p>
          </table:table-cell>
          <table:table-cell office:value-type="string" calcext:value-type="string">
            <text:p>https://one-draw.jp/ijinden/cardlist/001/card/01_002.png</text:p>
          </table:table-cell>
          <table:table-cell table:formula="of:=CONCATENATE([$JSON.$A$1];[.$C42];[$JSON.$B$1];[.$E42];[$JSON.$C$1];[.$F42];[$JSON.$D$1];IF(ISNA([.$S42]);&quot;null&quot;;&quot;&quot;&quot;&quot;&amp;[.$S42]&amp;&quot;&quot;&quot;&quot;);[$JSON.$E$1];[.$U42];[$JSON.$F$1];IF(ISNA([.$V42]);&quot;null&quot;;&quot;&quot;&quot;&quot;&amp;[.$V42]&amp;&quot;&quot;&quot;&quot;);[$JSON.$G$1];[.$X42];[$JSON.$H$1];[.$H42];[$JSON.$I$1];[.J42];[$JSON.$J$1];[.$L42];[$JSON.$K$1];[.$O42];[$JSON.$L$1];[.$N42];[$JSON.$M$1];[.$R42];[$JSON.$N$1];[.$T42];[$JSON.$O$1];[.$W42];[$JSON.$P$1];[.$A42];[$JSON.$Q$1];[.$B42];[$JSON.$R$1])" office:value-type="string" office:string-value="{&quot;id&quot;:&quot;1-2&quot;,&quot;name&quot;:&quot;クレオパトラ&quot;,&quot;kana&quot;:&quot;くれおぱとら&quot;,&quot;traitText&quot;:null,&quot;ruleText&quot;:&quot;戦場に置かれたときに発動できる。戦場のハイケイすべてを破壊する。¶ハイケイが破壊されるたび、1ドローする。&quot;,&quot;legacyText&quot;:&quot;1ドローする&quot;,&quot;imageUrl&quot;:&quot;https://one-draw.jp/ijinden/cardlist/001/card/01_002.png&quot;,&quot;expansion&quot;:15,&quot;rarity&quot;:4,&quot;type&quot;:1,&quot;level&quot;:5,&quot;color&quot;:1,&quot;term&quot;:0,&quot;trait&quot;:0,&quot;legacy&quot;:4,&quot;orderTable&quot;:41,&quot;orderDeck&quot;:145}," calcext:value-type="string">
            <text:p>{"id":"1-2","name":"クレオパトラ","kana":"くれおぱとら","traitText":null,"ruleText":"戦場に置かれたときに発動できる。戦場のハイケイすべてを破壊する。¶ハイケイが破壊されるたび、1ドローする。","legacyText":"1ドローする","imageUrl":"https://one-draw.jp/ijinden/cardlist/001/card/01_002.png","expansion":15,"rarity":4,"type":1,"level":5,"color":1,"term":0,"trait":0,"legacy":4,"orderTable":41,"orderDeck":145},</text:p>
          </table:table-cell>
          <table:table-cell table:number-columns-repeated="16347"/>
        </table:table-row>
        <table:table-row table:style-name="ro2">
          <table:table-cell office:value-type="float" office:value="42" calcext:value-type="float">
            <text:p>42</text:p>
          </table:table-cell>
          <table:table-cell office:value-type="float" office:value="77" calcext:value-type="float">
            <text:p>77</text:p>
          </table:table-cell>
          <table:table-cell office:value-type="string" calcext:value-type="string">
            <text:p>1-3</text:p>
          </table:table-cell>
          <table:table-cell office:value-type="float" office:value="3" calcext:value-type="float">
            <text:p>3</text:p>
          </table:table-cell>
          <table:table-cell office:value-type="string" calcext:value-type="string">
            <text:p>マルティン・ルター</text:p>
          </table:table-cell>
          <table:table-cell office:value-type="string" calcext:value-type="string">
            <text:p>まるてぃんるたー</text:p>
          </table:table-cell>
          <table:table-cell office:value-type="string" calcext:value-type="string">
            <text:p>第１弾ブースターパック</text:p>
          </table:table-cell>
          <table:table-cell table:formula="of:=VLOOKUP([.G43];[$収録番号.$A$1:$収録番号.$B$9];2;0)" office:value-type="float" office:value="15" calcext:value-type="float">
            <text:p>15</text:p>
          </table:table-cell>
          <table:table-cell office:value-type="string" calcext:value-type="string">
            <text:p>SR</text:p>
          </table:table-cell>
          <table:table-cell table:formula="of:=VLOOKUP([.I43];[$レアリティ番号.$A$1:$レアリティ番号.$B$4];2;0)" office:value-type="float" office:value="4" calcext:value-type="float">
            <text:p>4</text:p>
          </table:table-cell>
          <table:table-cell office:value-type="string" calcext:value-type="string">
            <text:p>イジン</text:p>
          </table:table-cell>
          <table:table-cell table:formula="of:=VLOOKUP([.K43];[$種類番号.$A$1:$種類番号.$B$4];2;0)" office:value-type="float" office:value="1" calcext:value-type="float">
            <text:p>1</text:p>
          </table:table-cell>
          <table:table-cell office:value-type="string" calcext:value-type="string">
            <text:p>青</text:p>
          </table:table-cell>
          <table:table-cell table:formula="of:=VLOOKUP([.M43];[$色番号.$A$1:$色番号.$B$5];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43];[$特性番号.$A$1:$特性番号.$B$8];2;0);0)" office:value-type="float" office:value="0" calcext:value-type="float">
            <text:p>0</text:p>
          </table:table-cell>
          <table:table-cell office:value-type="string" calcext:value-type="string">
            <text:p>相手はマホウ使用に際し、魔力ゾーンの裏のカードを墓地に置くことができない。¶相手のターンの間「パワー+3000」を得る。</text:p>
          </table:table-cell>
          <table:table-cell table:style-name="ce8" office:value-type="string" calcext:value-type="string">
            <text:p>1ドローする</text:p>
          </table:table-cell>
          <table:table-cell table:formula="of:=IFERROR(VLOOKUP([.$V43];[$遺業能力番号.$A$1:$遺業能力番号.$B$9];2;0);0)" office:value-type="float" office:value="4" calcext:value-type="float">
            <text:p>4</text:p>
          </table:table-cell>
          <table:table-cell office:value-type="string" calcext:value-type="string">
            <text:p>https://one-draw.jp/ijinden/cardlist/001/card/01_003.png</text:p>
          </table:table-cell>
          <table:table-cell table:formula="of:=CONCATENATE([$JSON.$A$1];[.$C43];[$JSON.$B$1];[.$E43];[$JSON.$C$1];[.$F43];[$JSON.$D$1];IF(ISNA([.$S43]);&quot;null&quot;;&quot;&quot;&quot;&quot;&amp;[.$S43]&amp;&quot;&quot;&quot;&quot;);[$JSON.$E$1];[.$U43];[$JSON.$F$1];IF(ISNA([.$V43]);&quot;null&quot;;&quot;&quot;&quot;&quot;&amp;[.$V43]&amp;&quot;&quot;&quot;&quot;);[$JSON.$G$1];[.$X43];[$JSON.$H$1];[.$H43];[$JSON.$I$1];[.J43];[$JSON.$J$1];[.$L43];[$JSON.$K$1];[.$O43];[$JSON.$L$1];[.$N43];[$JSON.$M$1];[.$R43];[$JSON.$N$1];[.$T43];[$JSON.$O$1];[.$W43];[$JSON.$P$1];[.$A43];[$JSON.$Q$1];[.$B43];[$JSON.$R$1])" office:value-type="string" office:string-value="{&quot;id&quot;:&quot;1-3&quot;,&quot;name&quot;:&quot;マルティン・ルター&quot;,&quot;kana&quot;:&quot;まるてぃんるたー&quot;,&quot;traitText&quot;:null,&quot;ruleText&quot;:&quot;相手はマホウ使用に際し、魔力ゾーンの裏のカードを墓地に置くことができない。¶相手のターンの間「パワー+3000」を得る。&quot;,&quot;legacyText&quot;:&quot;1ドローする&quot;,&quot;imageUrl&quot;:&quot;https://one-draw.jp/ijinden/cardlist/001/card/01_003.png&quot;,&quot;expansion&quot;:15,&quot;rarity&quot;:4,&quot;type&quot;:1,&quot;level&quot;:3,&quot;color&quot;:2,&quot;term&quot;:0,&quot;trait&quot;:0,&quot;legacy&quot;:4,&quot;orderTable&quot;:42,&quot;orderDeck&quot;:77}," calcext:value-type="string">
            <text:p>{"id":"1-3","name":"マルティン・ルター","kana":"まるてぃんるたー","traitText":null,"ruleText":"相手はマホウ使用に際し、魔力ゾーンの裏のカードを墓地に置くことができない。¶相手のターンの間「パワー+3000」を得る。","legacyText":"1ドローする","imageUrl":"https://one-draw.jp/ijinden/cardlist/001/card/01_003.png","expansion":15,"rarity":4,"type":1,"level":3,"color":2,"term":0,"trait":0,"legacy":4,"orderTable":42,"orderDeck":77},</text:p>
          </table:table-cell>
          <table:table-cell table:number-columns-repeated="16347"/>
        </table:table-row>
        <table:table-row table:style-name="ro2">
          <table:table-cell office:value-type="float" office:value="43" calcext:value-type="float">
            <text:p>43</text:p>
          </table:table-cell>
          <table:table-cell office:value-type="float" office:value="187" calcext:value-type="float">
            <text:p>187</text:p>
          </table:table-cell>
          <table:table-cell office:value-type="string" calcext:value-type="string">
            <text:p>1-4</text:p>
          </table:table-cell>
          <table:table-cell office:value-type="float" office:value="4" calcext:value-type="float">
            <text:p>4</text:p>
          </table:table-cell>
          <table:table-cell office:value-type="string" calcext:value-type="string">
            <text:p>クリストファー・コロンブス</text:p>
          </table:table-cell>
          <table:table-cell office:value-type="string" calcext:value-type="string">
            <text:p>くりすとふぁーころんぶす</text:p>
          </table:table-cell>
          <table:table-cell office:value-type="string" calcext:value-type="string">
            <text:p>第１弾ブースターパック</text:p>
          </table:table-cell>
          <table:table-cell table:formula="of:=VLOOKUP([.G44];[$収録番号.$A$1:$収録番号.$B$9];2;0)" office:value-type="float" office:value="15" calcext:value-type="float">
            <text:p>15</text:p>
          </table:table-cell>
          <table:table-cell office:value-type="string" calcext:value-type="string">
            <text:p>SR</text:p>
          </table:table-cell>
          <table:table-cell table:formula="of:=VLOOKUP([.I44];[$レアリティ番号.$A$1:$レアリティ番号.$B$4];2;0)" office:value-type="float" office:value="4" calcext:value-type="float">
            <text:p>4</text:p>
          </table:table-cell>
          <table:table-cell office:value-type="string" calcext:value-type="string">
            <text:p>イジン</text:p>
          </table:table-cell>
          <table:table-cell table:formula="of:=VLOOKUP([.K44];[$種類番号.$A$1:$種類番号.$B$4];2;0)" office:value-type="float" office:value="1" calcext:value-type="float">
            <text:p>1</text:p>
          </table:table-cell>
          <table:table-cell office:value-type="string" calcext:value-type="string">
            <text:p>青</text:p>
          </table:table-cell>
          <table:table-cell table:formula="of:=VLOOKUP([.M44];[$色番号.$A$1:$色番号.$B$5];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Q44];[$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44];[$特性番号.$A$1:$特性番号.$B$8];2;0);0)" office:value-type="float" office:value="0" calcext:value-type="float">
            <text:p>0</text:p>
          </table:table-cell>
          <table:table-cell office:value-type="string" calcext:value-type="string">
            <text:p>ダブルプレッシャー¶イジンからブロックされない。¶航海 - アタッカーになったとき、イジン召喚権+1する。</text:p>
          </table:table-cell>
          <table:table-cell table:style-name="ce8" table:formula="of:=NA()" office:value-type="string" office:string-value="" calcext:value-type="error">
            <text:p>#N/A</text:p>
          </table:table-cell>
          <table:table-cell table:formula="of:=IFERROR(VLOOKUP([.$V44];[$遺業能力番号.$A$1:$遺業能力番号.$B$9];2;0);0)" office:value-type="float" office:value="0" calcext:value-type="float">
            <text:p>0</text:p>
          </table:table-cell>
          <table:table-cell office:value-type="string" calcext:value-type="string">
            <text:p>https://one-draw.jp/ijinden/cardlist/001/card/01_004.png</text:p>
          </table:table-cell>
          <table:table-cell table:formula="of:=CONCATENATE([$JSON.$A$1];[.$C44];[$JSON.$B$1];[.$E44];[$JSON.$C$1];[.$F44];[$JSON.$D$1];IF(ISNA([.$S44]);&quot;null&quot;;&quot;&quot;&quot;&quot;&amp;[.$S44]&amp;&quot;&quot;&quot;&quot;);[$JSON.$E$1];[.$U44];[$JSON.$F$1];IF(ISNA([.$V44]);&quot;null&quot;;&quot;&quot;&quot;&quot;&amp;[.$V44]&amp;&quot;&quot;&quot;&quot;);[$JSON.$G$1];[.$X44];[$JSON.$H$1];[.$H44];[$JSON.$I$1];[.J44];[$JSON.$J$1];[.$L44];[$JSON.$K$1];[.$O44];[$JSON.$L$1];[.$N44];[$JSON.$M$1];[.$R44];[$JSON.$N$1];[.$T44];[$JSON.$O$1];[.$W44];[$JSON.$P$1];[.$A44];[$JSON.$Q$1];[.$B44];[$JSON.$R$1])" office:value-type="string" office:string-value="{&quot;id&quot;:&quot;1-4&quot;,&quot;name&quot;:&quot;クリストファー・コロンブス&quot;,&quot;kana&quot;:&quot;くりすとふぁーころんぶす&quot;,&quot;traitText&quot;:null,&quot;ruleText&quot;:&quot;ダブルプレッシャー¶イジンからブロックされない。¶航海 - アタッカーになったとき、イジン召喚権+1する。&quot;,&quot;legacyText&quot;:null,&quot;imageUrl&quot;:&quot;https://one-draw.jp/ijinden/cardlist/001/card/01_004.png&quot;,&quot;expansion&quot;:15,&quot;rarity&quot;:4,&quot;type&quot;:1,&quot;level&quot;:6,&quot;color&quot;:2,&quot;term&quot;:1,&quot;trait&quot;:0,&quot;legacy&quot;:0,&quot;orderTable&quot;:43,&quot;orderDeck&quot;:187}," calcext:value-type="string">
            <text:p>{"id":"1-4","name":"クリストファー・コロンブス","kana":"くりすとふぁーころんぶす","traitText":null,"ruleText":"ダブルプレッシャー¶イジンからブロックされない。¶航海 - アタッカーになったとき、イジン召喚権+1する。","legacyText":null,"imageUrl":"https://one-draw.jp/ijinden/cardlist/001/card/01_004.png","expansion":15,"rarity":4,"type":1,"level":6,"color":2,"term":1,"trait":0,"legacy":0,"orderTable":43,"orderDeck":187},</text:p>
          </table:table-cell>
          <table:table-cell table:number-columns-repeated="16347"/>
        </table:table-row>
        <table:table-row table:style-name="ro2">
          <table:table-cell office:value-type="float" office:value="44" calcext:value-type="float">
            <text:p>44</text:p>
          </table:table-cell>
          <table:table-cell office:value-type="float" office:value="208" calcext:value-type="float">
            <text:p>208</text:p>
          </table:table-cell>
          <table:table-cell office:value-type="string" calcext:value-type="string">
            <text:p>1-5</text:p>
          </table:table-cell>
          <table:table-cell office:value-type="float" office:value="5" calcext:value-type="float">
            <text:p>5</text:p>
          </table:table-cell>
          <table:table-cell office:value-type="string" calcext:value-type="string">
            <text:p>ヴォルフガング・アマデウス・モーツァルト</text:p>
          </table:table-cell>
          <table:table-cell office:value-type="string" calcext:value-type="string">
            <text:p>ゔぉるふがんぐあまでうすもーつぁると</text:p>
          </table:table-cell>
          <table:table-cell office:value-type="string" calcext:value-type="string">
            <text:p>第１弾ブースターパック</text:p>
          </table:table-cell>
          <table:table-cell table:formula="of:=VLOOKUP([.G45];[$収録番号.$A$1:$収録番号.$B$9];2;0)" office:value-type="float" office:value="15" calcext:value-type="float">
            <text:p>15</text:p>
          </table:table-cell>
          <table:table-cell office:value-type="string" calcext:value-type="string">
            <text:p>SR</text:p>
          </table:table-cell>
          <table:table-cell table:formula="of:=VLOOKUP([.I45];[$レアリティ番号.$A$1:$レアリティ番号.$B$4];2;0)" office:value-type="float" office:value="4" calcext:value-type="float">
            <text:p>4</text:p>
          </table:table-cell>
          <table:table-cell office:value-type="string" calcext:value-type="string">
            <text:p>イジン</text:p>
          </table:table-cell>
          <table:table-cell table:formula="of:=VLOOKUP([.K45];[$種類番号.$A$1:$種類番号.$B$4];2;0)" office:value-type="float" office:value="1" calcext:value-type="float">
            <text:p>1</text:p>
          </table:table-cell>
          <table:table-cell office:value-type="string" calcext:value-type="string">
            <text:p>緑</text:p>
          </table:table-cell>
          <table:table-cell table:formula="of:=VLOOKUP([.M45];[$色番号.$A$1:$色番号.$B$5];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5];[$能力語番号.$A$1:$能力語番号.$B$10];2;0);0)" office:value-type="float" office:value="0" calcext:value-type="float">
            <text:p>0</text:p>
          </table:table-cell>
          <table:table-cell office:value-type="string" calcext:value-type="string">
            <text:p>音楽</text:p>
          </table:table-cell>
          <table:table-cell table:formula="of:=IFERROR(VLOOKUP([.$S45];[$特性番号.$A$1:$特性番号.$B$8];2;0);0)" office:value-type="float" office:value="4" calcext:value-type="float">
            <text:p>4</text:p>
          </table:table-cell>
          <table:table-cell office:value-type="string" calcext:value-type="string">
            <text:p>これが戦場にいる間、相手の戦場の「音楽」イジンと、相手の墓地のカードは能力すべてを失う。この能力は、能力によって失われない。</text:p>
          </table:table-cell>
          <table:table-cell table:style-name="ce8" table:formula="of:=NA()" office:value-type="string" office:string-value="" calcext:value-type="error">
            <text:p>#N/A</text:p>
          </table:table-cell>
          <table:table-cell table:formula="of:=IFERROR(VLOOKUP([.$V45];[$遺業能力番号.$A$1:$遺業能力番号.$B$9];2;0);0)" office:value-type="float" office:value="0" calcext:value-type="float">
            <text:p>0</text:p>
          </table:table-cell>
          <table:table-cell office:value-type="string" calcext:value-type="string">
            <text:p>https://one-draw.jp/ijinden/cardlist/001/card/01_005.png</text:p>
          </table:table-cell>
          <table:table-cell table:formula="of:=CONCATENATE([$JSON.$A$1];[.$C45];[$JSON.$B$1];[.$E45];[$JSON.$C$1];[.$F45];[$JSON.$D$1];IF(ISNA([.$S45]);&quot;null&quot;;&quot;&quot;&quot;&quot;&amp;[.$S45]&amp;&quot;&quot;&quot;&quot;);[$JSON.$E$1];[.$U45];[$JSON.$F$1];IF(ISNA([.$V45]);&quot;null&quot;;&quot;&quot;&quot;&quot;&amp;[.$V45]&amp;&quot;&quot;&quot;&quot;);[$JSON.$G$1];[.$X45];[$JSON.$H$1];[.$H45];[$JSON.$I$1];[.J45];[$JSON.$J$1];[.$L45];[$JSON.$K$1];[.$O45];[$JSON.$L$1];[.$N45];[$JSON.$M$1];[.$R45];[$JSON.$N$1];[.$T45];[$JSON.$O$1];[.$W45];[$JSON.$P$1];[.$A45];[$JSON.$Q$1];[.$B45];[$JSON.$R$1])" office:value-type="string" office:string-value="{&quot;id&quot;:&quot;1-5&quot;,&quot;name&quot;:&quot;ヴォルフガング・アマデウス・モーツァルト&quot;,&quot;kana&quot;:&quot;ゔぉるふがんぐあまでうすもーつぁると&quot;,&quot;traitText&quot;:&quot;音楽&quot;,&quot;ruleText&quot;:&quot;これが戦場にいる間、相手の戦場の「音楽」イジンと、相手の墓地のカードは能力すべてを失う。この能力は、能力によって失われない。&quot;,&quot;legacyText&quot;:null,&quot;imageUrl&quot;:&quot;https://one-draw.jp/ijinden/cardlist/001/card/01_005.png&quot;,&quot;expansion&quot;:15,&quot;rarity&quot;:4,&quot;type&quot;:1,&quot;level&quot;:7,&quot;color&quot;:4,&quot;term&quot;:0,&quot;trait&quot;:4,&quot;legacy&quot;:0,&quot;orderTable&quot;:44,&quot;orderDeck&quot;:208}," calcext:value-type="string">
            <text:p>{"id":"1-5","name":"ヴォルフガング・アマデウス・モーツァルト","kana":"ゔぉるふがんぐあまでうすもーつぁると","traitText":"音楽","ruleText":"これが戦場にいる間、相手の戦場の「音楽」イジンと、相手の墓地のカードは能力すべてを失う。この能力は、能力によって失われない。","legacyText":null,"imageUrl":"https://one-draw.jp/ijinden/cardlist/001/card/01_005.png","expansion":15,"rarity":4,"type":1,"level":7,"color":4,"term":0,"trait":4,"legacy":0,"orderTable":44,"orderDeck":208},</text:p>
          </table:table-cell>
          <table:table-cell table:number-columns-repeated="16347"/>
        </table:table-row>
        <table:table-row table:style-name="ro2">
          <table:table-cell office:value-type="float" office:value="45" calcext:value-type="float">
            <text:p>45</text:p>
          </table:table-cell>
          <table:table-cell office:value-type="float" office:value="222" calcext:value-type="float">
            <text:p>222</text:p>
          </table:table-cell>
          <table:table-cell office:value-type="string" calcext:value-type="string">
            <text:p>1-6</text:p>
          </table:table-cell>
          <table:table-cell office:value-type="float" office:value="6" calcext:value-type="float">
            <text:p>6</text:p>
          </table:table-cell>
          <table:table-cell office:value-type="string" calcext:value-type="string">
            <text:p>紫式部</text:p>
          </table:table-cell>
          <table:table-cell office:value-type="string" calcext:value-type="string">
            <text:p>むらさきしきぶ</text:p>
          </table:table-cell>
          <table:table-cell office:value-type="string" calcext:value-type="string">
            <text:p>第１弾ブースターパック</text:p>
          </table:table-cell>
          <table:table-cell table:formula="of:=VLOOKUP([.G46];[$収録番号.$A$1:$収録番号.$B$9];2;0)" office:value-type="float" office:value="15" calcext:value-type="float">
            <text:p>15</text:p>
          </table:table-cell>
          <table:table-cell office:value-type="string" calcext:value-type="string">
            <text:p>SR</text:p>
          </table:table-cell>
          <table:table-cell table:formula="of:=VLOOKUP([.I46];[$レアリティ番号.$A$1:$レアリティ番号.$B$4];2;0)" office:value-type="float" office:value="4" calcext:value-type="float">
            <text:p>4</text:p>
          </table:table-cell>
          <table:table-cell office:value-type="string" calcext:value-type="string">
            <text:p>イジン</text:p>
          </table:table-cell>
          <table:table-cell table:formula="of:=VLOOKUP([.K46];[$種類番号.$A$1:$種類番号.$B$4];2;0)" office:value-type="float" office:value="1" calcext:value-type="float">
            <text:p>1</text:p>
          </table:table-cell>
          <table:table-cell office:value-type="string" calcext:value-type="string">
            <text:p>緑</text:p>
          </table:table-cell>
          <table:table-cell table:formula="of:=VLOOKUP([.M46];[$色番号.$A$1:$色番号.$B$5];2;0)" office:value-type="float" office:value="4" calcext:value-type="float">
            <text:p>4</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執筆</text:p>
          </table:table-cell>
          <table:table-cell table:formula="of:=IFERROR(VLOOKUP([.$Q4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46];[$特性番号.$A$1:$特性番号.$B$8];2;0);0)" office:value-type="float" office:value="0" calcext:value-type="float">
            <text:p>0</text:p>
          </table:table-cell>
          <table:table-cell office:value-type="string" calcext:value-type="string">
            <text:p>執筆 - ハイケイが戦場に置かれるたび、相手の戦場のイジン1体を裏にして魔力ゾーンに置く。</text:p>
          </table:table-cell>
          <table:table-cell table:style-name="ce8" office:value-type="string" calcext:value-type="string">
            <text:p>魔力化</text:p>
          </table:table-cell>
          <table:table-cell table:formula="of:=IFERROR(VLOOKUP([.$V46];[$遺業能力番号.$A$1:$遺業能力番号.$B$9];2;0);0)" office:value-type="float" office:value="1" calcext:value-type="float">
            <text:p>1</text:p>
          </table:table-cell>
          <table:table-cell office:value-type="string" calcext:value-type="string">
            <text:p>https://one-draw.jp/ijinden/cardlist/001/card/01_006.png</text:p>
          </table:table-cell>
          <table:table-cell table:formula="of:=CONCATENATE([$JSON.$A$1];[.$C46];[$JSON.$B$1];[.$E46];[$JSON.$C$1];[.$F46];[$JSON.$D$1];IF(ISNA([.$S46]);&quot;null&quot;;&quot;&quot;&quot;&quot;&amp;[.$S46]&amp;&quot;&quot;&quot;&quot;);[$JSON.$E$1];[.$U46];[$JSON.$F$1];IF(ISNA([.$V46]);&quot;null&quot;;&quot;&quot;&quot;&quot;&amp;[.$V46]&amp;&quot;&quot;&quot;&quot;);[$JSON.$G$1];[.$X46];[$JSON.$H$1];[.$H46];[$JSON.$I$1];[.J46];[$JSON.$J$1];[.$L46];[$JSON.$K$1];[.$O46];[$JSON.$L$1];[.$N46];[$JSON.$M$1];[.$R46];[$JSON.$N$1];[.$T46];[$JSON.$O$1];[.$W46];[$JSON.$P$1];[.$A46];[$JSON.$Q$1];[.$B46];[$JSON.$R$1])" office:value-type="string" office:string-value="{&quot;id&quot;:&quot;1-6&quot;,&quot;name&quot;:&quot;紫式部&quot;,&quot;kana&quot;:&quot;むらさきしきぶ&quot;,&quot;traitText&quot;:null,&quot;ruleText&quot;:&quot;執筆 - ハイケイが戦場に置かれるたび、相手の戦場のイジン1体を裏にして魔力ゾーンに置く。&quot;,&quot;legacyText&quot;:&quot;魔力化&quot;,&quot;imageUrl&quot;:&quot;https://one-draw.jp/ijinden/cardlist/001/card/01_006.png&quot;,&quot;expansion&quot;:15,&quot;rarity&quot;:4,&quot;type&quot;:1,&quot;level&quot;:8,&quot;color&quot;:4,&quot;term&quot;:2,&quot;trait&quot;:0,&quot;legacy&quot;:1,&quot;orderTable&quot;:45,&quot;orderDeck&quot;:222}," calcext:value-type="string">
            <text:p>{"id":"1-6","name":"紫式部","kana":"むらさきしきぶ","traitText":null,"ruleText":"執筆 - ハイケイが戦場に置かれるたび、相手の戦場のイジン1体を裏にして魔力ゾーンに置く。","legacyText":"魔力化","imageUrl":"https://one-draw.jp/ijinden/cardlist/001/card/01_006.png","expansion":15,"rarity":4,"type":1,"level":8,"color":4,"term":2,"trait":0,"legacy":1,"orderTable":45,"orderDeck":222},</text:p>
          </table:table-cell>
          <table:table-cell table:number-columns-repeated="16347"/>
        </table:table-row>
        <table:table-row table:style-name="ro2">
          <table:table-cell office:value-type="float" office:value="46" calcext:value-type="float">
            <text:p>46</text:p>
          </table:table-cell>
          <table:table-cell office:value-type="float" office:value="2" calcext:value-type="float">
            <text:p>2</text:p>
          </table:table-cell>
          <table:table-cell office:value-type="string" calcext:value-type="string">
            <text:p>1-7</text:p>
          </table:table-cell>
          <table:table-cell office:value-type="float" office:value="7" calcext:value-type="float">
            <text:p>7</text:p>
          </table:table-cell>
          <table:table-cell office:value-type="string" calcext:value-type="string">
            <text:p>マーサ・ジェーン・カナリー</text:p>
          </table:table-cell>
          <table:table-cell office:value-type="string" calcext:value-type="string">
            <text:p>まーさじぇーんかなりー</text:p>
          </table:table-cell>
          <table:table-cell office:value-type="string" calcext:value-type="string">
            <text:p>第１弾ブースターパック</text:p>
          </table:table-cell>
          <table:table-cell table:formula="of:=VLOOKUP([.G47];[$収録番号.$A$1:$収録番号.$B$9];2;0)" office:value-type="float" office:value="15" calcext:value-type="float">
            <text:p>15</text:p>
          </table:table-cell>
          <table:table-cell office:value-type="string" calcext:value-type="string">
            <text:p>N</text:p>
          </table:table-cell>
          <table:table-cell table:formula="of:=VLOOKUP([.I47];[$レアリティ番号.$A$1:$レアリティ番号.$B$4];2;0)" office:value-type="float" office:value="1" calcext:value-type="float">
            <text:p>1</text:p>
          </table:table-cell>
          <table:table-cell office:value-type="string" calcext:value-type="string">
            <text:p>イジン</text:p>
          </table:table-cell>
          <table:table-cell table:formula="of:=VLOOKUP([.K47];[$種類番号.$A$1:$種類番号.$B$4];2;0)" office:value-type="float" office:value="1" calcext:value-type="float">
            <text:p>1</text:p>
          </table:table-cell>
          <table:table-cell office:value-type="string" calcext:value-type="string">
            <text:p>赤</text:p>
          </table:table-cell>
          <table:table-cell table:formula="of:=VLOOKUP([.M47];[$色番号.$A$1:$色番号.$B$5];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47];[$特性番号.$A$1:$特性番号.$B$8];2;0);0)" office:value-type="float" office:value="0" calcext:value-type="float">
            <text:p>0</text:p>
          </table:table-cell>
          <table:table-cell office:value-type="string" calcext:value-type="string">
            <text:p>戦場に他の赤のイジンがいる間「即応」を得る。</text:p>
          </table:table-cell>
          <table:table-cell table:style-name="ce8" office:value-type="string" calcext:value-type="string">
            <text:p>1ドローする</text:p>
          </table:table-cell>
          <table:table-cell table:formula="of:=IFERROR(VLOOKUP([.$V47];[$遺業能力番号.$A$1:$遺業能力番号.$B$9];2;0);0)" office:value-type="float" office:value="4" calcext:value-type="float">
            <text:p>4</text:p>
          </table:table-cell>
          <table:table-cell office:value-type="string" calcext:value-type="string">
            <text:p>https://one-draw.jp/ijinden/cardlist/001/card/01_007.png</text:p>
          </table:table-cell>
          <table:table-cell table:formula="of:=CONCATENATE([$JSON.$A$1];[.$C47];[$JSON.$B$1];[.$E47];[$JSON.$C$1];[.$F47];[$JSON.$D$1];IF(ISNA([.$S47]);&quot;null&quot;;&quot;&quot;&quot;&quot;&amp;[.$S47]&amp;&quot;&quot;&quot;&quot;);[$JSON.$E$1];[.$U47];[$JSON.$F$1];IF(ISNA([.$V47]);&quot;null&quot;;&quot;&quot;&quot;&quot;&amp;[.$V47]&amp;&quot;&quot;&quot;&quot;);[$JSON.$G$1];[.$X47];[$JSON.$H$1];[.$H47];[$JSON.$I$1];[.J47];[$JSON.$J$1];[.$L47];[$JSON.$K$1];[.$O47];[$JSON.$L$1];[.$N47];[$JSON.$M$1];[.$R47];[$JSON.$N$1];[.$T47];[$JSON.$O$1];[.$W47];[$JSON.$P$1];[.$A47];[$JSON.$Q$1];[.$B47];[$JSON.$R$1])" office:value-type="string" office:string-value="{&quot;id&quot;:&quot;1-7&quot;,&quot;name&quot;:&quot;マーサ・ジェーン・カナリー&quot;,&quot;kana&quot;:&quot;まーさじぇーんかなりー&quot;,&quot;traitText&quot;:null,&quot;ruleText&quot;:&quot;戦場に他の赤のイジンがいる間「即応」を得る。&quot;,&quot;legacyText&quot;:&quot;1ドローする&quot;,&quot;imageUrl&quot;:&quot;https://one-draw.jp/ijinden/cardlist/001/card/01_007.png&quot;,&quot;expansion&quot;:15,&quot;rarity&quot;:1,&quot;type&quot;:1,&quot;level&quot;:1,&quot;color&quot;:1,&quot;term&quot;:0,&quot;trait&quot;:0,&quot;legacy&quot;:4,&quot;orderTable&quot;:46,&quot;orderDeck&quot;:2}," calcext:value-type="string">
            <text:p>{"id":"1-7","name":"マーサ・ジェーン・カナリー","kana":"まーさじぇーんかなりー","traitText":null,"ruleText":"戦場に他の赤のイジンがいる間「即応」を得る。","legacyText":"1ドローする","imageUrl":"https://one-draw.jp/ijinden/cardlist/001/card/01_007.png","expansion":15,"rarity":1,"type":1,"level":1,"color":1,"term":0,"trait":0,"legacy":4,"orderTable":46,"orderDeck":2},</text:p>
          </table:table-cell>
          <table:table-cell table:number-columns-repeated="16347"/>
        </table:table-row>
        <table:table-row table:style-name="ro2">
          <table:table-cell office:value-type="float" office:value="47" calcext:value-type="float">
            <text:p>47</text:p>
          </table:table-cell>
          <table:table-cell office:value-type="float" office:value="25" calcext:value-type="float">
            <text:p>25</text:p>
          </table:table-cell>
          <table:table-cell office:value-type="string" calcext:value-type="string">
            <text:p>1-8</text:p>
          </table:table-cell>
          <table:table-cell office:value-type="float" office:value="8" calcext:value-type="float">
            <text:p>8</text:p>
          </table:table-cell>
          <table:table-cell office:value-type="string" calcext:value-type="string">
            <text:p>明智光秀</text:p>
          </table:table-cell>
          <table:table-cell office:value-type="string" calcext:value-type="string">
            <text:p>あけちみつひで</text:p>
          </table:table-cell>
          <table:table-cell office:value-type="string" calcext:value-type="string">
            <text:p>第１弾ブースターパック</text:p>
          </table:table-cell>
          <table:table-cell table:formula="of:=VLOOKUP([.G48];[$収録番号.$A$1:$収録番号.$B$9];2;0)" office:value-type="float" office:value="15" calcext:value-type="float">
            <text:p>15</text:p>
          </table:table-cell>
          <table:table-cell office:value-type="string" calcext:value-type="string">
            <text:p>N</text:p>
          </table:table-cell>
          <table:table-cell table:formula="of:=VLOOKUP([.I48];[$レアリティ番号.$A$1:$レアリティ番号.$B$4];2;0)" office:value-type="float" office:value="1" calcext:value-type="float">
            <text:p>1</text:p>
          </table:table-cell>
          <table:table-cell office:value-type="string" calcext:value-type="string">
            <text:p>イジン</text:p>
          </table:table-cell>
          <table:table-cell table:formula="of:=VLOOKUP([.K48];[$種類番号.$A$1:$種類番号.$B$4];2;0)" office:value-type="float" office:value="1" calcext:value-type="float">
            <text:p>1</text:p>
          </table:table-cell>
          <table:table-cell office:value-type="string" calcext:value-type="string">
            <text:p>赤</text:p>
          </table:table-cell>
          <table:table-cell table:formula="of:=VLOOKUP([.M48];[$色番号.$A$1:$色番号.$B$5];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8];[$能力語番号.$A$1:$能力語番号.$B$10];2;0);0)" office:value-type="float" office:value="0" calcext:value-type="float">
            <text:p>0</text:p>
          </table:table-cell>
          <table:table-cell office:value-type="string" calcext:value-type="string">
            <text:p>剣術</text:p>
          </table:table-cell>
          <table:table-cell table:formula="of:=IFERROR(VLOOKUP([.$S48];[$特性番号.$A$1:$特性番号.$B$8];2;0);0)" office:value-type="float" office:value="1" calcext:value-type="float">
            <text:p>1</text:p>
          </table:table-cell>
          <table:table-cell office:value-type="string" calcext:value-type="string">
            <text:p>即応¶戦場に置かれたとき、自分の戦場のガーディアン1体を山札の上に戻す。</text:p>
          </table:table-cell>
          <table:table-cell table:style-name="ce8" table:formula="of:=NA()" office:value-type="string" office:string-value="" calcext:value-type="error">
            <text:p>#N/A</text:p>
          </table:table-cell>
          <table:table-cell table:formula="of:=IFERROR(VLOOKUP([.$V48];[$遺業能力番号.$A$1:$遺業能力番号.$B$9];2;0);0)" office:value-type="float" office:value="0" calcext:value-type="float">
            <text:p>0</text:p>
          </table:table-cell>
          <table:table-cell office:value-type="string" calcext:value-type="string">
            <text:p>https://one-draw.jp/ijinden/cardlist/001/card/01_008.png</text:p>
          </table:table-cell>
          <table:table-cell table:formula="of:=CONCATENATE([$JSON.$A$1];[.$C48];[$JSON.$B$1];[.$E48];[$JSON.$C$1];[.$F48];[$JSON.$D$1];IF(ISNA([.$S48]);&quot;null&quot;;&quot;&quot;&quot;&quot;&amp;[.$S48]&amp;&quot;&quot;&quot;&quot;);[$JSON.$E$1];[.$U48];[$JSON.$F$1];IF(ISNA([.$V48]);&quot;null&quot;;&quot;&quot;&quot;&quot;&amp;[.$V48]&amp;&quot;&quot;&quot;&quot;);[$JSON.$G$1];[.$X48];[$JSON.$H$1];[.$H48];[$JSON.$I$1];[.J48];[$JSON.$J$1];[.$L48];[$JSON.$K$1];[.$O48];[$JSON.$L$1];[.$N48];[$JSON.$M$1];[.$R48];[$JSON.$N$1];[.$T48];[$JSON.$O$1];[.$W48];[$JSON.$P$1];[.$A48];[$JSON.$Q$1];[.$B48];[$JSON.$R$1])" office:value-type="string" office:string-value="{&quot;id&quot;:&quot;1-8&quot;,&quot;name&quot;:&quot;明智光秀&quot;,&quot;kana&quot;:&quot;あけちみつひで&quot;,&quot;traitText&quot;:&quot;剣術&quot;,&quot;ruleText&quot;:&quot;即応¶戦場に置かれたとき、自分の戦場のガーディアン1体を山札の上に戻す。&quot;,&quot;legacyText&quot;:null,&quot;imageUrl&quot;:&quot;https://one-draw.jp/ijinden/cardlist/001/card/01_008.png&quot;,&quot;expansion&quot;:15,&quot;rarity&quot;:1,&quot;type&quot;:1,&quot;level&quot;:2,&quot;color&quot;:1,&quot;term&quot;:0,&quot;trait&quot;:1,&quot;legacy&quot;:0,&quot;orderTable&quot;:47,&quot;orderDeck&quot;:25}," calcext:value-type="string">
            <text:p>{"id":"1-8","name":"明智光秀","kana":"あけちみつひで","traitText":"剣術","ruleText":"即応¶戦場に置かれたとき、自分の戦場のガーディアン1体を山札の上に戻す。","legacyText":null,"imageUrl":"https://one-draw.jp/ijinden/cardlist/001/card/01_008.png","expansion":15,"rarity":1,"type":1,"level":2,"color":1,"term":0,"trait":1,"legacy":0,"orderTable":47,"orderDeck":25},</text:p>
          </table:table-cell>
          <table:table-cell table:number-columns-repeated="16347"/>
        </table:table-row>
        <table:table-row table:style-name="ro2">
          <table:table-cell office:value-type="float" office:value="48" calcext:value-type="float">
            <text:p>48</text:p>
          </table:table-cell>
          <table:table-cell office:value-type="float" office:value="26" calcext:value-type="float">
            <text:p>26</text:p>
          </table:table-cell>
          <table:table-cell office:value-type="string" calcext:value-type="string">
            <text:p>1-9</text:p>
          </table:table-cell>
          <table:table-cell office:value-type="float" office:value="9" calcext:value-type="float">
            <text:p>9</text:p>
          </table:table-cell>
          <table:table-cell office:value-type="string" calcext:value-type="string">
            <text:p>藤原純友</text:p>
          </table:table-cell>
          <table:table-cell office:value-type="string" calcext:value-type="string">
            <text:p>ふじわらのすみとも</text:p>
          </table:table-cell>
          <table:table-cell office:value-type="string" calcext:value-type="string">
            <text:p>第１弾ブースターパック</text:p>
          </table:table-cell>
          <table:table-cell table:formula="of:=VLOOKUP([.G49];[$収録番号.$A$1:$収録番号.$B$9];2;0)" office:value-type="float" office:value="15" calcext:value-type="float">
            <text:p>15</text:p>
          </table:table-cell>
          <table:table-cell office:value-type="string" calcext:value-type="string">
            <text:p>N</text:p>
          </table:table-cell>
          <table:table-cell table:formula="of:=VLOOKUP([.I49];[$レアリティ番号.$A$1:$レアリティ番号.$B$4];2;0)" office:value-type="float" office:value="1" calcext:value-type="float">
            <text:p>1</text:p>
          </table:table-cell>
          <table:table-cell office:value-type="string" calcext:value-type="string">
            <text:p>イジン</text:p>
          </table:table-cell>
          <table:table-cell table:formula="of:=VLOOKUP([.K49];[$種類番号.$A$1:$種類番号.$B$4];2;0)" office:value-type="float" office:value="1" calcext:value-type="float">
            <text:p>1</text:p>
          </table:table-cell>
          <table:table-cell office:value-type="string" calcext:value-type="string">
            <text:p>赤</text:p>
          </table:table-cell>
          <table:table-cell table:formula="of:=VLOOKUP([.M49];[$色番号.$A$1:$色番号.$B$5];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航海</text:p>
          </table:table-cell>
          <table:table-cell table:formula="of:=IFERROR(VLOOKUP([.$Q49];[$能力語番号.$A$1:$能力語番号.$B$10];2;0);0)" office:value-type="float" office:value="1" calcext:value-type="float">
            <text:p>1</text:p>
          </table:table-cell>
          <table:table-cell office:value-type="string" calcext:value-type="string">
            <text:p>剣術</text:p>
          </table:table-cell>
          <table:table-cell table:formula="of:=IFERROR(VLOOKUP([.$S49];[$特性番号.$A$1:$特性番号.$B$8];2;0);0)" office:value-type="float" office:value="1" calcext:value-type="float">
            <text:p>1</text:p>
          </table:table-cell>
          <table:table-cell office:value-type="string" calcext:value-type="string">
            <text:p>航海 - アタッカーになったとき、相手の戦場のハイケイ1つを破壊する。</text:p>
          </table:table-cell>
          <table:table-cell table:style-name="ce8" office:value-type="string" calcext:value-type="string">
            <text:p>1ドローする</text:p>
          </table:table-cell>
          <table:table-cell table:formula="of:=IFERROR(VLOOKUP([.$V49];[$遺業能力番号.$A$1:$遺業能力番号.$B$9];2;0);0)" office:value-type="float" office:value="4" calcext:value-type="float">
            <text:p>4</text:p>
          </table:table-cell>
          <table:table-cell office:value-type="string" calcext:value-type="string">
            <text:p>https://one-draw.jp/ijinden/cardlist/001/card/01_009.png</text:p>
          </table:table-cell>
          <table:table-cell table:formula="of:=CONCATENATE([$JSON.$A$1];[.$C49];[$JSON.$B$1];[.$E49];[$JSON.$C$1];[.$F49];[$JSON.$D$1];IF(ISNA([.$S49]);&quot;null&quot;;&quot;&quot;&quot;&quot;&amp;[.$S49]&amp;&quot;&quot;&quot;&quot;);[$JSON.$E$1];[.$U49];[$JSON.$F$1];IF(ISNA([.$V49]);&quot;null&quot;;&quot;&quot;&quot;&quot;&amp;[.$V49]&amp;&quot;&quot;&quot;&quot;);[$JSON.$G$1];[.$X49];[$JSON.$H$1];[.$H49];[$JSON.$I$1];[.J49];[$JSON.$J$1];[.$L49];[$JSON.$K$1];[.$O49];[$JSON.$L$1];[.$N49];[$JSON.$M$1];[.$R49];[$JSON.$N$1];[.$T49];[$JSON.$O$1];[.$W49];[$JSON.$P$1];[.$A49];[$JSON.$Q$1];[.$B49];[$JSON.$R$1])" office:value-type="string" office:string-value="{&quot;id&quot;:&quot;1-9&quot;,&quot;name&quot;:&quot;藤原純友&quot;,&quot;kana&quot;:&quot;ふじわらのすみとも&quot;,&quot;traitText&quot;:&quot;剣術&quot;,&quot;ruleText&quot;:&quot;航海 - アタッカーになったとき、相手の戦場のハイケイ1つを破壊する。&quot;,&quot;legacyText&quot;:&quot;1ドローする&quot;,&quot;imageUrl&quot;:&quot;https://one-draw.jp/ijinden/cardlist/001/card/01_009.png&quot;,&quot;expansion&quot;:15,&quot;rarity&quot;:1,&quot;type&quot;:1,&quot;level&quot;:2,&quot;color&quot;:1,&quot;term&quot;:1,&quot;trait&quot;:1,&quot;legacy&quot;:4,&quot;orderTable&quot;:48,&quot;orderDeck&quot;:26}," calcext:value-type="string">
            <text:p>{"id":"1-9","name":"藤原純友","kana":"ふじわらのすみとも","traitText":"剣術","ruleText":"航海 - アタッカーになったとき、相手の戦場のハイケイ1つを破壊する。","legacyText":"1ドローする","imageUrl":"https://one-draw.jp/ijinden/cardlist/001/card/01_009.png","expansion":15,"rarity":1,"type":1,"level":2,"color":1,"term":1,"trait":1,"legacy":4,"orderTable":48,"orderDeck":26},</text:p>
          </table:table-cell>
          <table:table-cell table:number-columns-repeated="16347"/>
        </table:table-row>
        <table:table-row table:style-name="ro2">
          <table:table-cell office:value-type="float" office:value="49" calcext:value-type="float">
            <text:p>49</text:p>
          </table:table-cell>
          <table:table-cell office:value-type="float" office:value="64" calcext:value-type="float">
            <text:p>64</text:p>
          </table:table-cell>
          <table:table-cell office:value-type="string" calcext:value-type="string">
            <text:p>1-10</text:p>
          </table:table-cell>
          <table:table-cell office:value-type="float" office:value="10" calcext:value-type="float">
            <text:p>10</text:p>
          </table:table-cell>
          <table:table-cell office:value-type="string" calcext:value-type="string">
            <text:p>徳川家康</text:p>
          </table:table-cell>
          <table:table-cell office:value-type="string" calcext:value-type="string">
            <text:p>とくがわいえやす</text:p>
          </table:table-cell>
          <table:table-cell office:value-type="string" calcext:value-type="string">
            <text:p>第１弾ブースターパック</text:p>
          </table:table-cell>
          <table:table-cell table:formula="of:=VLOOKUP([.G50];[$収録番号.$A$1:$収録番号.$B$9];2;0)" office:value-type="float" office:value="15" calcext:value-type="float">
            <text:p>15</text:p>
          </table:table-cell>
          <table:table-cell office:value-type="string" calcext:value-type="string">
            <text:p>N</text:p>
          </table:table-cell>
          <table:table-cell table:formula="of:=VLOOKUP([.I50];[$レアリティ番号.$A$1:$レアリティ番号.$B$4];2;0)" office:value-type="float" office:value="1" calcext:value-type="float">
            <text:p>1</text:p>
          </table:table-cell>
          <table:table-cell office:value-type="string" calcext:value-type="string">
            <text:p>イジン</text:p>
          </table:table-cell>
          <table:table-cell table:formula="of:=VLOOKUP([.K50];[$種類番号.$A$1:$種類番号.$B$4];2;0)" office:value-type="float" office:value="1" calcext:value-type="float">
            <text:p>1</text:p>
          </table:table-cell>
          <table:table-cell office:value-type="string" calcext:value-type="string">
            <text:p>赤</text:p>
          </table:table-cell>
          <table:table-cell table:formula="of:=VLOOKUP([.M50];[$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0];[$能力語番号.$A$1:$能力語番号.$B$10];2;0);0)" office:value-type="float" office:value="0" calcext:value-type="float">
            <text:p>0</text:p>
          </table:table-cell>
          <table:table-cell office:value-type="string" calcext:value-type="string">
            <text:p>剣術</text:p>
          </table:table-cell>
          <table:table-cell table:formula="of:=IFERROR(VLOOKUP([.$S50];[$特性番号.$A$1:$特性番号.$B$8];2;0);0)" office:value-type="float" office:value="1" calcext:value-type="float">
            <text:p>1</text:p>
          </table:table-cell>
          <table:table-cell office:value-type="string" calcext:value-type="string">
            <text:p>戦場に置かれたとき、イジン召喚権+1する。</text:p>
          </table:table-cell>
          <table:table-cell table:style-name="ce8" office:value-type="string" calcext:value-type="string">
            <text:p>1ドローする</text:p>
          </table:table-cell>
          <table:table-cell table:formula="of:=IFERROR(VLOOKUP([.$V50];[$遺業能力番号.$A$1:$遺業能力番号.$B$9];2;0);0)" office:value-type="float" office:value="4" calcext:value-type="float">
            <text:p>4</text:p>
          </table:table-cell>
          <table:table-cell office:value-type="string" calcext:value-type="string">
            <text:p>https://one-draw.jp/ijinden/cardlist/001/card/01_010.png</text:p>
          </table:table-cell>
          <table:table-cell table:formula="of:=CONCATENATE([$JSON.$A$1];[.$C50];[$JSON.$B$1];[.$E50];[$JSON.$C$1];[.$F50];[$JSON.$D$1];IF(ISNA([.$S50]);&quot;null&quot;;&quot;&quot;&quot;&quot;&amp;[.$S50]&amp;&quot;&quot;&quot;&quot;);[$JSON.$E$1];[.$U50];[$JSON.$F$1];IF(ISNA([.$V50]);&quot;null&quot;;&quot;&quot;&quot;&quot;&amp;[.$V50]&amp;&quot;&quot;&quot;&quot;);[$JSON.$G$1];[.$X50];[$JSON.$H$1];[.$H50];[$JSON.$I$1];[.J50];[$JSON.$J$1];[.$L50];[$JSON.$K$1];[.$O50];[$JSON.$L$1];[.$N50];[$JSON.$M$1];[.$R50];[$JSON.$N$1];[.$T50];[$JSON.$O$1];[.$W50];[$JSON.$P$1];[.$A50];[$JSON.$Q$1];[.$B50];[$JSON.$R$1])" office:value-type="string" office:string-value="{&quot;id&quot;:&quot;1-10&quot;,&quot;name&quot;:&quot;徳川家康&quot;,&quot;kana&quot;:&quot;とくがわいえやす&quot;,&quot;traitText&quot;:&quot;剣術&quot;,&quot;ruleText&quot;:&quot;戦場に置かれたとき、イジン召喚権+1する。&quot;,&quot;legacyText&quot;:&quot;1ドローする&quot;,&quot;imageUrl&quot;:&quot;https://one-draw.jp/ijinden/cardlist/001/card/01_010.png&quot;,&quot;expansion&quot;:15,&quot;rarity&quot;:1,&quot;type&quot;:1,&quot;level&quot;:3,&quot;color&quot;:1,&quot;term&quot;:0,&quot;trait&quot;:1,&quot;legacy&quot;:4,&quot;orderTable&quot;:49,&quot;orderDeck&quot;:64}," calcext:value-type="string">
            <text:p>{"id":"1-10","name":"徳川家康","kana":"とくがわいえやす","traitText":"剣術","ruleText":"戦場に置かれたとき、イジン召喚権+1する。","legacyText":"1ドローする","imageUrl":"https://one-draw.jp/ijinden/cardlist/001/card/01_010.png","expansion":15,"rarity":1,"type":1,"level":3,"color":1,"term":0,"trait":1,"legacy":4,"orderTable":49,"orderDeck":64},</text:p>
          </table:table-cell>
          <table:table-cell table:number-columns-repeated="16347"/>
        </table:table-row>
        <table:table-row table:style-name="ro2">
          <table:table-cell office:value-type="float" office:value="50" calcext:value-type="float">
            <text:p>50</text:p>
          </table:table-cell>
          <table:table-cell office:value-type="float" office:value="65" calcext:value-type="float">
            <text:p>65</text:p>
          </table:table-cell>
          <table:table-cell office:value-type="string" calcext:value-type="string">
            <text:p>1-11</text:p>
          </table:table-cell>
          <table:table-cell office:value-type="float" office:value="11" calcext:value-type="float">
            <text:p>11</text:p>
          </table:table-cell>
          <table:table-cell office:value-type="string" calcext:value-type="string">
            <text:p>直江兼続</text:p>
          </table:table-cell>
          <table:table-cell office:value-type="string" calcext:value-type="string">
            <text:p>なおえかねつぐ</text:p>
          </table:table-cell>
          <table:table-cell office:value-type="string" calcext:value-type="string">
            <text:p>第１弾ブースターパック</text:p>
          </table:table-cell>
          <table:table-cell table:formula="of:=VLOOKUP([.G51];[$収録番号.$A$1:$収録番号.$B$9];2;0)" office:value-type="float" office:value="15" calcext:value-type="float">
            <text:p>15</text:p>
          </table:table-cell>
          <table:table-cell office:value-type="string" calcext:value-type="string">
            <text:p>N</text:p>
          </table:table-cell>
          <table:table-cell table:formula="of:=VLOOKUP([.I51];[$レアリティ番号.$A$1:$レアリティ番号.$B$4];2;0)" office:value-type="float" office:value="1" calcext:value-type="float">
            <text:p>1</text:p>
          </table:table-cell>
          <table:table-cell office:value-type="string" calcext:value-type="string">
            <text:p>イジン</text:p>
          </table:table-cell>
          <table:table-cell table:formula="of:=VLOOKUP([.K51];[$種類番号.$A$1:$種類番号.$B$4];2;0)" office:value-type="float" office:value="1" calcext:value-type="float">
            <text:p>1</text:p>
          </table:table-cell>
          <table:table-cell office:value-type="string" calcext:value-type="string">
            <text:p>赤</text:p>
          </table:table-cell>
          <table:table-cell table:formula="of:=VLOOKUP([.M51];[$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1];[$能力語番号.$A$1:$能力語番号.$B$10];2;0);0)" office:value-type="float" office:value="0" calcext:value-type="float">
            <text:p>0</text:p>
          </table:table-cell>
          <table:table-cell office:value-type="string" calcext:value-type="string">
            <text:p>剣術</text:p>
          </table:table-cell>
          <table:table-cell table:formula="of:=IFERROR(VLOOKUP([.$S51];[$特性番号.$A$1:$特性番号.$B$8];2;0);0)" office:value-type="float" office:value="1" calcext:value-type="float">
            <text:p>1</text:p>
          </table:table-cell>
          <table:table-cell office:value-type="string" calcext:value-type="string">
            <text:p>これが戦場にいる間、自分の戦場の「剣術」イジンは「アタック+2000」を得る。</text:p>
          </table:table-cell>
          <table:table-cell table:style-name="ce8" office:value-type="string" calcext:value-type="string">
            <text:p>1ドローする</text:p>
          </table:table-cell>
          <table:table-cell table:formula="of:=IFERROR(VLOOKUP([.$V51];[$遺業能力番号.$A$1:$遺業能力番号.$B$9];2;0);0)" office:value-type="float" office:value="4" calcext:value-type="float">
            <text:p>4</text:p>
          </table:table-cell>
          <table:table-cell office:value-type="string" calcext:value-type="string">
            <text:p>https://one-draw.jp/ijinden/cardlist/001/card/01_011.png</text:p>
          </table:table-cell>
          <table:table-cell table:formula="of:=CONCATENATE([$JSON.$A$1];[.$C51];[$JSON.$B$1];[.$E51];[$JSON.$C$1];[.$F51];[$JSON.$D$1];IF(ISNA([.$S51]);&quot;null&quot;;&quot;&quot;&quot;&quot;&amp;[.$S51]&amp;&quot;&quot;&quot;&quot;);[$JSON.$E$1];[.$U51];[$JSON.$F$1];IF(ISNA([.$V51]);&quot;null&quot;;&quot;&quot;&quot;&quot;&amp;[.$V51]&amp;&quot;&quot;&quot;&quot;);[$JSON.$G$1];[.$X51];[$JSON.$H$1];[.$H51];[$JSON.$I$1];[.J51];[$JSON.$J$1];[.$L51];[$JSON.$K$1];[.$O51];[$JSON.$L$1];[.$N51];[$JSON.$M$1];[.$R51];[$JSON.$N$1];[.$T51];[$JSON.$O$1];[.$W51];[$JSON.$P$1];[.$A51];[$JSON.$Q$1];[.$B51];[$JSON.$R$1])" office:value-type="string" office:string-value="{&quot;id&quot;:&quot;1-11&quot;,&quot;name&quot;:&quot;直江兼続&quot;,&quot;kana&quot;:&quot;なおえかねつぐ&quot;,&quot;traitText&quot;:&quot;剣術&quot;,&quot;ruleText&quot;:&quot;これが戦場にいる間、自分の戦場の「剣術」イジンは「アタック+2000」を得る。&quot;,&quot;legacyText&quot;:&quot;1ドローする&quot;,&quot;imageUrl&quot;:&quot;https://one-draw.jp/ijinden/cardlist/001/card/01_011.png&quot;,&quot;expansion&quot;:15,&quot;rarity&quot;:1,&quot;type&quot;:1,&quot;level&quot;:3,&quot;color&quot;:1,&quot;term&quot;:0,&quot;trait&quot;:1,&quot;legacy&quot;:4,&quot;orderTable&quot;:50,&quot;orderDeck&quot;:65}," calcext:value-type="string">
            <text:p>{"id":"1-11","name":"直江兼続","kana":"なおえかねつぐ","traitText":"剣術","ruleText":"これが戦場にいる間、自分の戦場の「剣術」イジンは「アタック+2000」を得る。","legacyText":"1ドローする","imageUrl":"https://one-draw.jp/ijinden/cardlist/001/card/01_011.png","expansion":15,"rarity":1,"type":1,"level":3,"color":1,"term":0,"trait":1,"legacy":4,"orderTable":50,"orderDeck":65},</text:p>
          </table:table-cell>
          <table:table-cell table:number-columns-repeated="16347"/>
        </table:table-row>
        <table:table-row table:style-name="ro2">
          <table:table-cell office:value-type="float" office:value="51" calcext:value-type="float">
            <text:p>51</text:p>
          </table:table-cell>
          <table:table-cell office:value-type="float" office:value="66" calcext:value-type="float">
            <text:p>66</text:p>
          </table:table-cell>
          <table:table-cell office:value-type="string" calcext:value-type="string">
            <text:p>1-12</text:p>
          </table:table-cell>
          <table:table-cell office:value-type="float" office:value="12" calcext:value-type="float">
            <text:p>12</text:p>
          </table:table-cell>
          <table:table-cell office:value-type="string" calcext:value-type="string">
            <text:p>藤原頼通</text:p>
          </table:table-cell>
          <table:table-cell office:value-type="string" calcext:value-type="string">
            <text:p>ふじわらのよりみち</text:p>
          </table:table-cell>
          <table:table-cell office:value-type="string" calcext:value-type="string">
            <text:p>第１弾ブースターパック</text:p>
          </table:table-cell>
          <table:table-cell table:formula="of:=VLOOKUP([.G52];[$収録番号.$A$1:$収録番号.$B$9];2;0)" office:value-type="float" office:value="15" calcext:value-type="float">
            <text:p>15</text:p>
          </table:table-cell>
          <table:table-cell office:value-type="string" calcext:value-type="string">
            <text:p>N</text:p>
          </table:table-cell>
          <table:table-cell table:formula="of:=VLOOKUP([.I52];[$レアリティ番号.$A$1:$レアリティ番号.$B$4];2;0)" office:value-type="float" office:value="1" calcext:value-type="float">
            <text:p>1</text:p>
          </table:table-cell>
          <table:table-cell office:value-type="string" calcext:value-type="string">
            <text:p>イジン</text:p>
          </table:table-cell>
          <table:table-cell table:formula="of:=VLOOKUP([.K52];[$種類番号.$A$1:$種類番号.$B$4];2;0)" office:value-type="float" office:value="1" calcext:value-type="float">
            <text:p>1</text:p>
          </table:table-cell>
          <table:table-cell office:value-type="string" calcext:value-type="string">
            <text:p>赤</text:p>
          </table:table-cell>
          <table:table-cell table:formula="of:=VLOOKUP([.M52];[$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Q52];[$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52];[$特性番号.$A$1:$特性番号.$B$8];2;0);0)" office:value-type="float" office:value="0" calcext:value-type="float">
            <text:p>0</text:p>
          </table:table-cell>
          <table:table-cell office:value-type="string" calcext:value-type="string">
            <text:p>執筆 - ハイケイが戦場に置かれるたび、そのハイケイのレベル以下のレベルを持つ墓地のマホウ1つを指定して発動できる。それを手札に戻す。</text:p>
          </table:table-cell>
          <table:table-cell table:style-name="ce8" office:value-type="string" calcext:value-type="string">
            <text:p>1ドローする</text:p>
          </table:table-cell>
          <table:table-cell table:formula="of:=IFERROR(VLOOKUP([.$V52];[$遺業能力番号.$A$1:$遺業能力番号.$B$9];2;0);0)" office:value-type="float" office:value="4" calcext:value-type="float">
            <text:p>4</text:p>
          </table:table-cell>
          <table:table-cell office:value-type="string" calcext:value-type="string">
            <text:p>https://one-draw.jp/ijinden/cardlist/001/card/01_012.png</text:p>
          </table:table-cell>
          <table:table-cell table:formula="of:=CONCATENATE([$JSON.$A$1];[.$C52];[$JSON.$B$1];[.$E52];[$JSON.$C$1];[.$F52];[$JSON.$D$1];IF(ISNA([.$S52]);&quot;null&quot;;&quot;&quot;&quot;&quot;&amp;[.$S52]&amp;&quot;&quot;&quot;&quot;);[$JSON.$E$1];[.$U52];[$JSON.$F$1];IF(ISNA([.$V52]);&quot;null&quot;;&quot;&quot;&quot;&quot;&amp;[.$V52]&amp;&quot;&quot;&quot;&quot;);[$JSON.$G$1];[.$X52];[$JSON.$H$1];[.$H52];[$JSON.$I$1];[.J52];[$JSON.$J$1];[.$L52];[$JSON.$K$1];[.$O52];[$JSON.$L$1];[.$N52];[$JSON.$M$1];[.$R52];[$JSON.$N$1];[.$T52];[$JSON.$O$1];[.$W52];[$JSON.$P$1];[.$A52];[$JSON.$Q$1];[.$B52];[$JSON.$R$1])" office:value-type="string" office:string-value="{&quot;id&quot;:&quot;1-12&quot;,&quot;name&quot;:&quot;藤原頼通&quot;,&quot;kana&quot;:&quot;ふじわらのよりみち&quot;,&quot;traitText&quot;:null,&quot;ruleText&quot;:&quot;執筆 - ハイケイが戦場に置かれるたび、そのハイケイのレベル以下のレベルを持つ墓地のマホウ1つを指定して発動できる。それを手札に戻す。&quot;,&quot;legacyText&quot;:&quot;1ドローする&quot;,&quot;imageUrl&quot;:&quot;https://one-draw.jp/ijinden/cardlist/001/card/01_012.png&quot;,&quot;expansion&quot;:15,&quot;rarity&quot;:1,&quot;type&quot;:1,&quot;level&quot;:3,&quot;color&quot;:1,&quot;term&quot;:2,&quot;trait&quot;:0,&quot;legacy&quot;:4,&quot;orderTable&quot;:51,&quot;orderDeck&quot;:66}," calcext:value-type="string">
            <text:p>{"id":"1-12","name":"藤原頼通","kana":"ふじわらのよりみち","traitText":null,"ruleText":"執筆 - ハイケイが戦場に置かれるたび、そのハイケイのレベル以下のレベルを持つ墓地のマホウ1つを指定して発動できる。それを手札に戻す。","legacyText":"1ドローする","imageUrl":"https://one-draw.jp/ijinden/cardlist/001/card/01_012.png","expansion":15,"rarity":1,"type":1,"level":3,"color":1,"term":2,"trait":0,"legacy":4,"orderTable":51,"orderDeck":66},</text:p>
          </table:table-cell>
          <table:table-cell table:number-columns-repeated="16347"/>
        </table:table-row>
        <table:table-row table:style-name="ro2">
          <table:table-cell office:value-type="float" office:value="52" calcext:value-type="float">
            <text:p>52</text:p>
          </table:table-cell>
          <table:table-cell office:value-type="float" office:value="67" calcext:value-type="float">
            <text:p>67</text:p>
          </table:table-cell>
          <table:table-cell office:value-type="string" calcext:value-type="string">
            <text:p>1-13</text:p>
          </table:table-cell>
          <table:table-cell office:value-type="float" office:value="13" calcext:value-type="float">
            <text:p>13</text:p>
          </table:table-cell>
          <table:table-cell office:value-type="string" calcext:value-type="string">
            <text:p>北条政子</text:p>
          </table:table-cell>
          <table:table-cell office:value-type="string" calcext:value-type="string">
            <text:p>ほうじょうまさこ</text:p>
          </table:table-cell>
          <table:table-cell office:value-type="string" calcext:value-type="string">
            <text:p>第１弾ブースターパック</text:p>
          </table:table-cell>
          <table:table-cell table:formula="of:=VLOOKUP([.G53];[$収録番号.$A$1:$収録番号.$B$9];2;0)" office:value-type="float" office:value="15" calcext:value-type="float">
            <text:p>15</text:p>
          </table:table-cell>
          <table:table-cell office:value-type="string" calcext:value-type="string">
            <text:p>R</text:p>
          </table:table-cell>
          <table:table-cell table:formula="of:=VLOOKUP([.I53];[$レアリティ番号.$A$1:$レアリティ番号.$B$4];2;0)" office:value-type="float" office:value="2" calcext:value-type="float">
            <text:p>2</text:p>
          </table:table-cell>
          <table:table-cell office:value-type="string" calcext:value-type="string">
            <text:p>イジン</text:p>
          </table:table-cell>
          <table:table-cell table:formula="of:=VLOOKUP([.K53];[$種類番号.$A$1:$種類番号.$B$4];2;0)" office:value-type="float" office:value="1" calcext:value-type="float">
            <text:p>1</text:p>
          </table:table-cell>
          <table:table-cell office:value-type="string" calcext:value-type="string">
            <text:p>赤</text:p>
          </table:table-cell>
          <table:table-cell table:formula="of:=VLOOKUP([.M53];[$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3];[$特性番号.$A$1:$特性番号.$B$8];2;0);0)" office:value-type="float" office:value="0" calcext:value-type="float">
            <text:p>0</text:p>
          </table:table-cell>
          <table:table-cell office:value-type="string" calcext:value-type="string">
            <text:p>戦場に置かれたとき、これのパワー以下のパワーを持つ相手の戦場のイジン1体を破壊する。¶これが戦場にいる間、自分の戦場の「剣術」イジンは「パワー+1000」を得る。</text:p>
          </table:table-cell>
          <table:table-cell table:style-name="ce8" table:formula="of:=NA()" office:value-type="string" office:string-value="" calcext:value-type="error">
            <text:p>#N/A</text:p>
          </table:table-cell>
          <table:table-cell table:formula="of:=IFERROR(VLOOKUP([.$V53];[$遺業能力番号.$A$1:$遺業能力番号.$B$9];2;0);0)" office:value-type="float" office:value="0" calcext:value-type="float">
            <text:p>0</text:p>
          </table:table-cell>
          <table:table-cell office:value-type="string" calcext:value-type="string">
            <text:p>https://one-draw.jp/ijinden/cardlist/001/card/01_013.png</text:p>
          </table:table-cell>
          <table:table-cell table:formula="of:=CONCATENATE([$JSON.$A$1];[.$C53];[$JSON.$B$1];[.$E53];[$JSON.$C$1];[.$F53];[$JSON.$D$1];IF(ISNA([.$S53]);&quot;null&quot;;&quot;&quot;&quot;&quot;&amp;[.$S53]&amp;&quot;&quot;&quot;&quot;);[$JSON.$E$1];[.$U53];[$JSON.$F$1];IF(ISNA([.$V53]);&quot;null&quot;;&quot;&quot;&quot;&quot;&amp;[.$V53]&amp;&quot;&quot;&quot;&quot;);[$JSON.$G$1];[.$X53];[$JSON.$H$1];[.$H53];[$JSON.$I$1];[.J53];[$JSON.$J$1];[.$L53];[$JSON.$K$1];[.$O53];[$JSON.$L$1];[.$N53];[$JSON.$M$1];[.$R53];[$JSON.$N$1];[.$T53];[$JSON.$O$1];[.$W53];[$JSON.$P$1];[.$A53];[$JSON.$Q$1];[.$B53];[$JSON.$R$1])" office:value-type="string" office:string-value="{&quot;id&quot;:&quot;1-13&quot;,&quot;name&quot;:&quot;北条政子&quot;,&quot;kana&quot;:&quot;ほうじょうまさこ&quot;,&quot;traitText&quot;:null,&quot;ruleText&quot;:&quot;戦場に置かれたとき、これのパワー以下のパワーを持つ相手の戦場のイジン1体を破壊する。¶これが戦場にいる間、自分の戦場の「剣術」イジンは「パワー+1000」を得る。&quot;,&quot;legacyText&quot;:null,&quot;imageUrl&quot;:&quot;https://one-draw.jp/ijinden/cardlist/001/card/01_013.png&quot;,&quot;expansion&quot;:15,&quot;rarity&quot;:2,&quot;type&quot;:1,&quot;level&quot;:3,&quot;color&quot;:1,&quot;term&quot;:0,&quot;trait&quot;:0,&quot;legacy&quot;:0,&quot;orderTable&quot;:52,&quot;orderDeck&quot;:67}," calcext:value-type="string">
            <text:p>{"id":"1-13","name":"北条政子","kana":"ほうじょうまさこ","traitText":null,"ruleText":"戦場に置かれたとき、これのパワー以下のパワーを持つ相手の戦場のイジン1体を破壊する。¶これが戦場にいる間、自分の戦場の「剣術」イジンは「パワー+1000」を得る。","legacyText":null,"imageUrl":"https://one-draw.jp/ijinden/cardlist/001/card/01_013.png","expansion":15,"rarity":2,"type":1,"level":3,"color":1,"term":0,"trait":0,"legacy":0,"orderTable":52,"orderDeck":67},</text:p>
          </table:table-cell>
          <table:table-cell table:number-columns-repeated="16347"/>
        </table:table-row>
        <table:table-row table:style-name="ro2">
          <table:table-cell office:value-type="float" office:value="53" calcext:value-type="float">
            <text:p>53</text:p>
          </table:table-cell>
          <table:table-cell office:value-type="float" office:value="108" calcext:value-type="float">
            <text:p>108</text:p>
          </table:table-cell>
          <table:table-cell office:value-type="string" calcext:value-type="string">
            <text:p>1-14</text:p>
          </table:table-cell>
          <table:table-cell office:value-type="float" office:value="14" calcext:value-type="float">
            <text:p>14</text:p>
          </table:table-cell>
          <table:table-cell office:value-type="string" calcext:value-type="string">
            <text:p>ジョージ・アームストロング・カスター</text:p>
          </table:table-cell>
          <table:table-cell office:value-type="string" calcext:value-type="string">
            <text:p>じょーじあーむすとろんぐかすたー</text:p>
          </table:table-cell>
          <table:table-cell office:value-type="string" calcext:value-type="string">
            <text:p>第１弾ブースターパック</text:p>
          </table:table-cell>
          <table:table-cell table:formula="of:=VLOOKUP([.G54];[$収録番号.$A$1:$収録番号.$B$9];2;0)" office:value-type="float" office:value="15" calcext:value-type="float">
            <text:p>15</text:p>
          </table:table-cell>
          <table:table-cell office:value-type="string" calcext:value-type="string">
            <text:p>N</text:p>
          </table:table-cell>
          <table:table-cell table:formula="of:=VLOOKUP([.I54];[$レアリティ番号.$A$1:$レアリティ番号.$B$4];2;0)" office:value-type="float" office:value="1" calcext:value-type="float">
            <text:p>1</text:p>
          </table:table-cell>
          <table:table-cell office:value-type="string" calcext:value-type="string">
            <text:p>イジン</text:p>
          </table:table-cell>
          <table:table-cell table:formula="of:=VLOOKUP([.K54];[$種類番号.$A$1:$種類番号.$B$4];2;0)" office:value-type="float" office:value="1" calcext:value-type="float">
            <text:p>1</text:p>
          </table:table-cell>
          <table:table-cell office:value-type="string" calcext:value-type="string">
            <text:p>赤</text:p>
          </table:table-cell>
          <table:table-cell table:formula="of:=VLOOKUP([.M54];[$色番号.$A$1:$色番号.$B$5];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4];[$特性番号.$A$1:$特性番号.$B$8];2;0);0)" office:value-type="float" office:value="0" calcext:value-type="float">
            <text:p>0</text:p>
          </table:table-cell>
          <table:table-cell office:value-type="string" calcext:value-type="string">
            <text:p>即応¶これが戦場にいる間「即応」を持つ自分の戦場のイジンは「アタック+1000」を得る。</text:p>
          </table:table-cell>
          <table:table-cell table:style-name="ce8" office:value-type="string" calcext:value-type="string">
            <text:p>1ドローする</text:p>
          </table:table-cell>
          <table:table-cell table:formula="of:=IFERROR(VLOOKUP([.$V54];[$遺業能力番号.$A$1:$遺業能力番号.$B$9];2;0);0)" office:value-type="float" office:value="4" calcext:value-type="float">
            <text:p>4</text:p>
          </table:table-cell>
          <table:table-cell office:value-type="string" calcext:value-type="string">
            <text:p>https://one-draw.jp/ijinden/cardlist/001/card/01_014.png</text:p>
          </table:table-cell>
          <table:table-cell table:formula="of:=CONCATENATE([$JSON.$A$1];[.$C54];[$JSON.$B$1];[.$E54];[$JSON.$C$1];[.$F54];[$JSON.$D$1];IF(ISNA([.$S54]);&quot;null&quot;;&quot;&quot;&quot;&quot;&amp;[.$S54]&amp;&quot;&quot;&quot;&quot;);[$JSON.$E$1];[.$U54];[$JSON.$F$1];IF(ISNA([.$V54]);&quot;null&quot;;&quot;&quot;&quot;&quot;&amp;[.$V54]&amp;&quot;&quot;&quot;&quot;);[$JSON.$G$1];[.$X54];[$JSON.$H$1];[.$H54];[$JSON.$I$1];[.J54];[$JSON.$J$1];[.$L54];[$JSON.$K$1];[.$O54];[$JSON.$L$1];[.$N54];[$JSON.$M$1];[.$R54];[$JSON.$N$1];[.$T54];[$JSON.$O$1];[.$W54];[$JSON.$P$1];[.$A54];[$JSON.$Q$1];[.$B54];[$JSON.$R$1])" office:value-type="string" office:string-value="{&quot;id&quot;:&quot;1-14&quot;,&quot;name&quot;:&quot;ジョージ・アームストロング・カスター&quot;,&quot;kana&quot;:&quot;じょーじあーむすとろんぐかすたー&quot;,&quot;traitText&quot;:null,&quot;ruleText&quot;:&quot;即応¶これが戦場にいる間「即応」を持つ自分の戦場のイジンは「アタック+1000」を得る。&quot;,&quot;legacyText&quot;:&quot;1ドローする&quot;,&quot;imageUrl&quot;:&quot;https://one-draw.jp/ijinden/cardlist/001/card/01_014.png&quot;,&quot;expansion&quot;:15,&quot;rarity&quot;:1,&quot;type&quot;:1,&quot;level&quot;:4,&quot;color&quot;:1,&quot;term&quot;:0,&quot;trait&quot;:0,&quot;legacy&quot;:4,&quot;orderTable&quot;:53,&quot;orderDeck&quot;:108}," calcext:value-type="string">
            <text:p>{"id":"1-14","name":"ジョージ・アームストロング・カスター","kana":"じょーじあーむすとろんぐかすたー","traitText":null,"ruleText":"即応¶これが戦場にいる間「即応」を持つ自分の戦場のイジンは「アタック+1000」を得る。","legacyText":"1ドローする","imageUrl":"https://one-draw.jp/ijinden/cardlist/001/card/01_014.png","expansion":15,"rarity":1,"type":1,"level":4,"color":1,"term":0,"trait":0,"legacy":4,"orderTable":53,"orderDeck":108},</text:p>
          </table:table-cell>
          <table:table-cell table:number-columns-repeated="16347"/>
        </table:table-row>
        <table:table-row table:style-name="ro2">
          <table:table-cell office:value-type="float" office:value="54" calcext:value-type="float">
            <text:p>54</text:p>
          </table:table-cell>
          <table:table-cell office:value-type="float" office:value="109" calcext:value-type="float">
            <text:p>109</text:p>
          </table:table-cell>
          <table:table-cell office:value-type="string" calcext:value-type="string">
            <text:p>1-15</text:p>
          </table:table-cell>
          <table:table-cell office:value-type="float" office:value="15" calcext:value-type="float">
            <text:p>15</text:p>
          </table:table-cell>
          <table:table-cell office:value-type="string" calcext:value-type="string">
            <text:p>中臣鎌足</text:p>
          </table:table-cell>
          <table:table-cell office:value-type="string" calcext:value-type="string">
            <text:p>なかとみのかまたり</text:p>
          </table:table-cell>
          <table:table-cell office:value-type="string" calcext:value-type="string">
            <text:p>第１弾ブースターパック</text:p>
          </table:table-cell>
          <table:table-cell table:formula="of:=VLOOKUP([.G55];[$収録番号.$A$1:$収録番号.$B$9];2;0)" office:value-type="float" office:value="15" calcext:value-type="float">
            <text:p>15</text:p>
          </table:table-cell>
          <table:table-cell office:value-type="string" calcext:value-type="string">
            <text:p>R</text:p>
          </table:table-cell>
          <table:table-cell table:formula="of:=VLOOKUP([.I55];[$レアリティ番号.$A$1:$レアリティ番号.$B$4];2;0)" office:value-type="float" office:value="2" calcext:value-type="float">
            <text:p>2</text:p>
          </table:table-cell>
          <table:table-cell office:value-type="string" calcext:value-type="string">
            <text:p>イジン</text:p>
          </table:table-cell>
          <table:table-cell table:formula="of:=VLOOKUP([.K55];[$種類番号.$A$1:$種類番号.$B$4];2;0)" office:value-type="float" office:value="1" calcext:value-type="float">
            <text:p>1</text:p>
          </table:table-cell>
          <table:table-cell office:value-type="string" calcext:value-type="string">
            <text:p>赤</text:p>
          </table:table-cell>
          <table:table-cell table:formula="of:=VLOOKUP([.M55];[$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5];[$特性番号.$A$1:$特性番号.$B$8];2;0);0)" office:value-type="float" office:value="0" calcext:value-type="float">
            <text:p>0</text:p>
          </table:table-cell>
          <table:table-cell office:value-type="string" calcext:value-type="string">
            <text:p>戦場に置かれたとき、自分の山札の上から5枚を墓地に置いて発動できる。このターンの間「即応」を得る。</text:p>
          </table:table-cell>
          <table:table-cell table:style-name="ce8" table:formula="of:=NA()" office:value-type="string" office:string-value="" calcext:value-type="error">
            <text:p>#N/A</text:p>
          </table:table-cell>
          <table:table-cell table:formula="of:=IFERROR(VLOOKUP([.$V55];[$遺業能力番号.$A$1:$遺業能力番号.$B$9];2;0);0)" office:value-type="float" office:value="0" calcext:value-type="float">
            <text:p>0</text:p>
          </table:table-cell>
          <table:table-cell office:value-type="string" calcext:value-type="string">
            <text:p>https://one-draw.jp/ijinden/cardlist/001/card/01_015.png</text:p>
          </table:table-cell>
          <table:table-cell table:formula="of:=CONCATENATE([$JSON.$A$1];[.$C55];[$JSON.$B$1];[.$E55];[$JSON.$C$1];[.$F55];[$JSON.$D$1];IF(ISNA([.$S55]);&quot;null&quot;;&quot;&quot;&quot;&quot;&amp;[.$S55]&amp;&quot;&quot;&quot;&quot;);[$JSON.$E$1];[.$U55];[$JSON.$F$1];IF(ISNA([.$V55]);&quot;null&quot;;&quot;&quot;&quot;&quot;&amp;[.$V55]&amp;&quot;&quot;&quot;&quot;);[$JSON.$G$1];[.$X55];[$JSON.$H$1];[.$H55];[$JSON.$I$1];[.J55];[$JSON.$J$1];[.$L55];[$JSON.$K$1];[.$O55];[$JSON.$L$1];[.$N55];[$JSON.$M$1];[.$R55];[$JSON.$N$1];[.$T55];[$JSON.$O$1];[.$W55];[$JSON.$P$1];[.$A55];[$JSON.$Q$1];[.$B55];[$JSON.$R$1])" office:value-type="string" office:string-value="{&quot;id&quot;:&quot;1-15&quot;,&quot;name&quot;:&quot;中臣鎌足&quot;,&quot;kana&quot;:&quot;なかとみのかまたり&quot;,&quot;traitText&quot;:null,&quot;ruleText&quot;:&quot;戦場に置かれたとき、自分の山札の上から5枚を墓地に置いて発動できる。このターンの間「即応」を得る。&quot;,&quot;legacyText&quot;:null,&quot;imageUrl&quot;:&quot;https://one-draw.jp/ijinden/cardlist/001/card/01_015.png&quot;,&quot;expansion&quot;:15,&quot;rarity&quot;:2,&quot;type&quot;:1,&quot;level&quot;:4,&quot;color&quot;:1,&quot;term&quot;:0,&quot;trait&quot;:0,&quot;legacy&quot;:0,&quot;orderTable&quot;:54,&quot;orderDeck&quot;:109}," calcext:value-type="string">
            <text:p>{"id":"1-15","name":"中臣鎌足","kana":"なかとみのかまたり","traitText":null,"ruleText":"戦場に置かれたとき、自分の山札の上から5枚を墓地に置いて発動できる。このターンの間「即応」を得る。","legacyText":null,"imageUrl":"https://one-draw.jp/ijinden/cardlist/001/card/01_015.png","expansion":15,"rarity":2,"type":1,"level":4,"color":1,"term":0,"trait":0,"legacy":0,"orderTable":54,"orderDeck":109},</text:p>
          </table:table-cell>
          <table:table-cell table:number-columns-repeated="16347"/>
        </table:table-row>
        <table:table-row table:style-name="ro2">
          <table:table-cell office:value-type="float" office:value="55" calcext:value-type="float">
            <text:p>55</text:p>
          </table:table-cell>
          <table:table-cell office:value-type="float" office:value="110" calcext:value-type="float">
            <text:p>110</text:p>
          </table:table-cell>
          <table:table-cell office:value-type="string" calcext:value-type="string">
            <text:p>1-16</text:p>
          </table:table-cell>
          <table:table-cell office:value-type="float" office:value="16" calcext:value-type="float">
            <text:p>16</text:p>
          </table:table-cell>
          <table:table-cell office:value-type="string" calcext:value-type="string">
            <text:p>マルクス・アントニウス</text:p>
          </table:table-cell>
          <table:table-cell office:value-type="string" calcext:value-type="string">
            <text:p>まるくすあんとにうす</text:p>
          </table:table-cell>
          <table:table-cell office:value-type="string" calcext:value-type="string">
            <text:p>第１弾ブースターパック</text:p>
          </table:table-cell>
          <table:table-cell table:formula="of:=VLOOKUP([.G56];[$収録番号.$A$1:$収録番号.$B$9];2;0)" office:value-type="float" office:value="15" calcext:value-type="float">
            <text:p>15</text:p>
          </table:table-cell>
          <table:table-cell office:value-type="string" calcext:value-type="string">
            <text:p>N</text:p>
          </table:table-cell>
          <table:table-cell table:formula="of:=VLOOKUP([.I56];[$レアリティ番号.$A$1:$レアリティ番号.$B$4];2;0)" office:value-type="float" office:value="1" calcext:value-type="float">
            <text:p>1</text:p>
          </table:table-cell>
          <table:table-cell office:value-type="string" calcext:value-type="string">
            <text:p>イジン</text:p>
          </table:table-cell>
          <table:table-cell table:formula="of:=VLOOKUP([.K56];[$種類番号.$A$1:$種類番号.$B$4];2;0)" office:value-type="float" office:value="1" calcext:value-type="float">
            <text:p>1</text:p>
          </table:table-cell>
          <table:table-cell office:value-type="string" calcext:value-type="string">
            <text:p>赤</text:p>
          </table:table-cell>
          <table:table-cell table:formula="of:=VLOOKUP([.M56];[$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6];[$特性番号.$A$1:$特性番号.$B$8];2;0);0)" office:value-type="float" office:value="0" calcext:value-type="float">
            <text:p>0</text:p>
          </table:table-cell>
          <table:table-cell office:value-type="string" calcext:value-type="string">
            <text:p>戦場に置かれたとき、自分の戦場のガーディアン1体を裏のまま魔力ゾーンに置いて発動できる。イジン召喚権+1する。¶アタック+2000</text:p>
          </table:table-cell>
          <table:table-cell table:style-name="ce8" table:formula="of:=NA()" office:value-type="string" office:string-value="" calcext:value-type="error">
            <text:p>#N/A</text:p>
          </table:table-cell>
          <table:table-cell table:formula="of:=IFERROR(VLOOKUP([.$V56];[$遺業能力番号.$A$1:$遺業能力番号.$B$9];2;0);0)" office:value-type="float" office:value="0" calcext:value-type="float">
            <text:p>0</text:p>
          </table:table-cell>
          <table:table-cell office:value-type="string" calcext:value-type="string">
            <text:p>https://one-draw.jp/ijinden/cardlist/001/card/01_016.png</text:p>
          </table:table-cell>
          <table:table-cell table:formula="of:=CONCATENATE([$JSON.$A$1];[.$C56];[$JSON.$B$1];[.$E56];[$JSON.$C$1];[.$F56];[$JSON.$D$1];IF(ISNA([.$S56]);&quot;null&quot;;&quot;&quot;&quot;&quot;&amp;[.$S56]&amp;&quot;&quot;&quot;&quot;);[$JSON.$E$1];[.$U56];[$JSON.$F$1];IF(ISNA([.$V56]);&quot;null&quot;;&quot;&quot;&quot;&quot;&amp;[.$V56]&amp;&quot;&quot;&quot;&quot;);[$JSON.$G$1];[.$X56];[$JSON.$H$1];[.$H56];[$JSON.$I$1];[.J56];[$JSON.$J$1];[.$L56];[$JSON.$K$1];[.$O56];[$JSON.$L$1];[.$N56];[$JSON.$M$1];[.$R56];[$JSON.$N$1];[.$T56];[$JSON.$O$1];[.$W56];[$JSON.$P$1];[.$A56];[$JSON.$Q$1];[.$B56];[$JSON.$R$1])" office:value-type="string" office:string-value="{&quot;id&quot;:&quot;1-16&quot;,&quot;name&quot;:&quot;マルクス・アントニウス&quot;,&quot;kana&quot;:&quot;まるくすあんとにうす&quot;,&quot;traitText&quot;:null,&quot;ruleText&quot;:&quot;戦場に置かれたとき、自分の戦場のガーディアン1体を裏のまま魔力ゾーンに置いて発動できる。イジン召喚権+1する。¶アタック+2000&quot;,&quot;legacyText&quot;:null,&quot;imageUrl&quot;:&quot;https://one-draw.jp/ijinden/cardlist/001/card/01_016.png&quot;,&quot;expansion&quot;:15,&quot;rarity&quot;:1,&quot;type&quot;:1,&quot;level&quot;:4,&quot;color&quot;:1,&quot;term&quot;:0,&quot;trait&quot;:0,&quot;legacy&quot;:0,&quot;orderTable&quot;:55,&quot;orderDeck&quot;:110}," calcext:value-type="string">
            <text:p>{"id":"1-16","name":"マルクス・アントニウス","kana":"まるくすあんとにうす","traitText":null,"ruleText":"戦場に置かれたとき、自分の戦場のガーディアン1体を裏のまま魔力ゾーンに置いて発動できる。イジン召喚権+1する。¶アタック+2000","legacyText":null,"imageUrl":"https://one-draw.jp/ijinden/cardlist/001/card/01_016.png","expansion":15,"rarity":1,"type":1,"level":4,"color":1,"term":0,"trait":0,"legacy":0,"orderTable":55,"orderDeck":110},</text:p>
          </table:table-cell>
          <table:table-cell table:number-columns-repeated="16347"/>
        </table:table-row>
        <table:table-row table:style-name="ro2">
          <table:table-cell office:value-type="float" office:value="56" calcext:value-type="float">
            <text:p>56</text:p>
          </table:table-cell>
          <table:table-cell office:value-type="float" office:value="146" calcext:value-type="float">
            <text:p>146</text:p>
          </table:table-cell>
          <table:table-cell office:value-type="string" calcext:value-type="string">
            <text:p>1-17</text:p>
          </table:table-cell>
          <table:table-cell office:value-type="float" office:value="17" calcext:value-type="float">
            <text:p>17</text:p>
          </table:table-cell>
          <table:table-cell office:value-type="string" calcext:value-type="string">
            <text:p>藤原道長</text:p>
          </table:table-cell>
          <table:table-cell office:value-type="string" calcext:value-type="string">
            <text:p>ふじわらのみちなが</text:p>
          </table:table-cell>
          <table:table-cell office:value-type="string" calcext:value-type="string">
            <text:p>第１弾ブースターパック</text:p>
          </table:table-cell>
          <table:table-cell table:formula="of:=VLOOKUP([.G57];[$収録番号.$A$1:$収録番号.$B$9];2;0)" office:value-type="float" office:value="15" calcext:value-type="float">
            <text:p>15</text:p>
          </table:table-cell>
          <table:table-cell office:value-type="string" calcext:value-type="string">
            <text:p>N</text:p>
          </table:table-cell>
          <table:table-cell table:formula="of:=VLOOKUP([.I57];[$レアリティ番号.$A$1:$レアリティ番号.$B$4];2;0)" office:value-type="float" office:value="1" calcext:value-type="float">
            <text:p>1</text:p>
          </table:table-cell>
          <table:table-cell office:value-type="string" calcext:value-type="string">
            <text:p>イジン</text:p>
          </table:table-cell>
          <table:table-cell table:formula="of:=VLOOKUP([.K57];[$種類番号.$A$1:$種類番号.$B$4];2;0)" office:value-type="float" office:value="1" calcext:value-type="float">
            <text:p>1</text:p>
          </table:table-cell>
          <table:table-cell office:value-type="string" calcext:value-type="string">
            <text:p>赤</text:p>
          </table:table-cell>
          <table:table-cell table:formula="of:=VLOOKUP([.M57];[$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7];[$特性番号.$A$1:$特性番号.$B$8];2;0);0)" office:value-type="float" office:value="0" calcext:value-type="float">
            <text:p>0</text:p>
          </table:table-cell>
          <table:table-cell office:value-type="string" calcext:value-type="string">
            <text:p>戦場に置かれたとき、自分の魔力ゾーンのマリョク1色につき、自分の墓地のマホウ1つを手札に戻す。</text:p>
          </table:table-cell>
          <table:table-cell table:style-name="ce8" table:formula="of:=NA()" office:value-type="string" office:string-value="" calcext:value-type="error">
            <text:p>#N/A</text:p>
          </table:table-cell>
          <table:table-cell table:formula="of:=IFERROR(VLOOKUP([.$V57];[$遺業能力番号.$A$1:$遺業能力番号.$B$9];2;0);0)" office:value-type="float" office:value="0" calcext:value-type="float">
            <text:p>0</text:p>
          </table:table-cell>
          <table:table-cell office:value-type="string" calcext:value-type="string">
            <text:p>https://one-draw.jp/ijinden/cardlist/001/card/01_017.png</text:p>
          </table:table-cell>
          <table:table-cell table:formula="of:=CONCATENATE([$JSON.$A$1];[.$C57];[$JSON.$B$1];[.$E57];[$JSON.$C$1];[.$F57];[$JSON.$D$1];IF(ISNA([.$S57]);&quot;null&quot;;&quot;&quot;&quot;&quot;&amp;[.$S57]&amp;&quot;&quot;&quot;&quot;);[$JSON.$E$1];[.$U57];[$JSON.$F$1];IF(ISNA([.$V57]);&quot;null&quot;;&quot;&quot;&quot;&quot;&amp;[.$V57]&amp;&quot;&quot;&quot;&quot;);[$JSON.$G$1];[.$X57];[$JSON.$H$1];[.$H57];[$JSON.$I$1];[.J57];[$JSON.$J$1];[.$L57];[$JSON.$K$1];[.$O57];[$JSON.$L$1];[.$N57];[$JSON.$M$1];[.$R57];[$JSON.$N$1];[.$T57];[$JSON.$O$1];[.$W57];[$JSON.$P$1];[.$A57];[$JSON.$Q$1];[.$B57];[$JSON.$R$1])" office:value-type="string" office:string-value="{&quot;id&quot;:&quot;1-17&quot;,&quot;name&quot;:&quot;藤原道長&quot;,&quot;kana&quot;:&quot;ふじわらのみちなが&quot;,&quot;traitText&quot;:null,&quot;ruleText&quot;:&quot;戦場に置かれたとき、自分の魔力ゾーンのマリョク1色につき、自分の墓地のマホウ1つを手札に戻す。&quot;,&quot;legacyText&quot;:null,&quot;imageUrl&quot;:&quot;https://one-draw.jp/ijinden/cardlist/001/card/01_017.png&quot;,&quot;expansion&quot;:15,&quot;rarity&quot;:1,&quot;type&quot;:1,&quot;level&quot;:5,&quot;color&quot;:1,&quot;term&quot;:0,&quot;trait&quot;:0,&quot;legacy&quot;:0,&quot;orderTable&quot;:56,&quot;orderDeck&quot;:146}," calcext:value-type="string">
            <text:p>{"id":"1-17","name":"藤原道長","kana":"ふじわらのみちなが","traitText":null,"ruleText":"戦場に置かれたとき、自分の魔力ゾーンのマリョク1色につき、自分の墓地のマホウ1つを手札に戻す。","legacyText":null,"imageUrl":"https://one-draw.jp/ijinden/cardlist/001/card/01_017.png","expansion":15,"rarity":1,"type":1,"level":5,"color":1,"term":0,"trait":0,"legacy":0,"orderTable":56,"orderDeck":146},</text:p>
          </table:table-cell>
          <table:table-cell table:number-columns-repeated="16347"/>
        </table:table-row>
        <table:table-row table:style-name="ro2">
          <table:table-cell office:value-type="float" office:value="57" calcext:value-type="float">
            <text:p>57</text:p>
          </table:table-cell>
          <table:table-cell office:value-type="float" office:value="147" calcext:value-type="float">
            <text:p>147</text:p>
          </table:table-cell>
          <table:table-cell office:value-type="string" calcext:value-type="string">
            <text:p>1-18</text:p>
          </table:table-cell>
          <table:table-cell office:value-type="float" office:value="18" calcext:value-type="float">
            <text:p>18</text:p>
          </table:table-cell>
          <table:table-cell office:value-type="string" calcext:value-type="string">
            <text:p>源頼朝</text:p>
          </table:table-cell>
          <table:table-cell office:value-type="string" calcext:value-type="string">
            <text:p>みなもとのよりとも</text:p>
          </table:table-cell>
          <table:table-cell office:value-type="string" calcext:value-type="string">
            <text:p>第１弾ブースターパック</text:p>
          </table:table-cell>
          <table:table-cell table:formula="of:=VLOOKUP([.G58];[$収録番号.$A$1:$収録番号.$B$9];2;0)" office:value-type="float" office:value="15" calcext:value-type="float">
            <text:p>15</text:p>
          </table:table-cell>
          <table:table-cell office:value-type="string" calcext:value-type="string">
            <text:p>N</text:p>
          </table:table-cell>
          <table:table-cell table:formula="of:=VLOOKUP([.I58];[$レアリティ番号.$A$1:$レアリティ番号.$B$4];2;0)" office:value-type="float" office:value="1" calcext:value-type="float">
            <text:p>1</text:p>
          </table:table-cell>
          <table:table-cell office:value-type="string" calcext:value-type="string">
            <text:p>イジン</text:p>
          </table:table-cell>
          <table:table-cell table:formula="of:=VLOOKUP([.K58];[$種類番号.$A$1:$種類番号.$B$4];2;0)" office:value-type="float" office:value="1" calcext:value-type="float">
            <text:p>1</text:p>
          </table:table-cell>
          <table:table-cell office:value-type="string" calcext:value-type="string">
            <text:p>赤</text:p>
          </table:table-cell>
          <table:table-cell table:formula="of:=VLOOKUP([.M58];[$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8];[$特性番号.$A$1:$特性番号.$B$8];2;0);0)" office:value-type="float" office:value="0" calcext:value-type="float">
            <text:p>0</text:p>
          </table:table-cell>
          <table:table-cell office:value-type="string" calcext:value-type="string">
            <text:p>戦場に置かれたとき、パワー4000以下の相手の戦場のイジン1体を破壊する。</text:p>
          </table:table-cell>
          <table:table-cell table:style-name="ce8" table:formula="of:=NA()" office:value-type="string" office:string-value="" calcext:value-type="error">
            <text:p>#N/A</text:p>
          </table:table-cell>
          <table:table-cell table:formula="of:=IFERROR(VLOOKUP([.$V58];[$遺業能力番号.$A$1:$遺業能力番号.$B$9];2;0);0)" office:value-type="float" office:value="0" calcext:value-type="float">
            <text:p>0</text:p>
          </table:table-cell>
          <table:table-cell office:value-type="string" calcext:value-type="string">
            <text:p>https://one-draw.jp/ijinden/cardlist/001/card/01_018.png</text:p>
          </table:table-cell>
          <table:table-cell table:formula="of:=CONCATENATE([$JSON.$A$1];[.$C58];[$JSON.$B$1];[.$E58];[$JSON.$C$1];[.$F58];[$JSON.$D$1];IF(ISNA([.$S58]);&quot;null&quot;;&quot;&quot;&quot;&quot;&amp;[.$S58]&amp;&quot;&quot;&quot;&quot;);[$JSON.$E$1];[.$U58];[$JSON.$F$1];IF(ISNA([.$V58]);&quot;null&quot;;&quot;&quot;&quot;&quot;&amp;[.$V58]&amp;&quot;&quot;&quot;&quot;);[$JSON.$G$1];[.$X58];[$JSON.$H$1];[.$H58];[$JSON.$I$1];[.J58];[$JSON.$J$1];[.$L58];[$JSON.$K$1];[.$O58];[$JSON.$L$1];[.$N58];[$JSON.$M$1];[.$R58];[$JSON.$N$1];[.$T58];[$JSON.$O$1];[.$W58];[$JSON.$P$1];[.$A58];[$JSON.$Q$1];[.$B58];[$JSON.$R$1])" office:value-type="string" office:string-value="{&quot;id&quot;:&quot;1-18&quot;,&quot;name&quot;:&quot;源頼朝&quot;,&quot;kana&quot;:&quot;みなもとのよりとも&quot;,&quot;traitText&quot;:null,&quot;ruleText&quot;:&quot;戦場に置かれたとき、パワー4000以下の相手の戦場のイジン1体を破壊する。&quot;,&quot;legacyText&quot;:null,&quot;imageUrl&quot;:&quot;https://one-draw.jp/ijinden/cardlist/001/card/01_018.png&quot;,&quot;expansion&quot;:15,&quot;rarity&quot;:1,&quot;type&quot;:1,&quot;level&quot;:5,&quot;color&quot;:1,&quot;term&quot;:0,&quot;trait&quot;:0,&quot;legacy&quot;:0,&quot;orderTable&quot;:57,&quot;orderDeck&quot;:147}," calcext:value-type="string">
            <text:p>{"id":"1-18","name":"源頼朝","kana":"みなもとのよりとも","traitText":null,"ruleText":"戦場に置かれたとき、パワー4000以下の相手の戦場のイジン1体を破壊する。","legacyText":null,"imageUrl":"https://one-draw.jp/ijinden/cardlist/001/card/01_018.png","expansion":15,"rarity":1,"type":1,"level":5,"color":1,"term":0,"trait":0,"legacy":0,"orderTable":57,"orderDeck":147},</text:p>
          </table:table-cell>
          <table:table-cell table:number-columns-repeated="16347"/>
        </table:table-row>
        <table:table-row table:style-name="ro2">
          <table:table-cell office:value-type="float" office:value="58" calcext:value-type="float">
            <text:p>58</text:p>
          </table:table-cell>
          <table:table-cell office:value-type="float" office:value="203" calcext:value-type="float">
            <text:p>203</text:p>
          </table:table-cell>
          <table:table-cell office:value-type="string" calcext:value-type="string">
            <text:p>1-19</text:p>
          </table:table-cell>
          <table:table-cell office:value-type="float" office:value="19" calcext:value-type="float">
            <text:p>19</text:p>
          </table:table-cell>
          <table:table-cell office:value-type="string" calcext:value-type="string">
            <text:p>ガイウス・ユリウス・カエサル</text:p>
          </table:table-cell>
          <table:table-cell office:value-type="string" calcext:value-type="string">
            <text:p>がいうすゆりうすかえさる</text:p>
          </table:table-cell>
          <table:table-cell office:value-type="string" calcext:value-type="string">
            <text:p>第１弾ブースターパック</text:p>
          </table:table-cell>
          <table:table-cell table:formula="of:=VLOOKUP([.G59];[$収録番号.$A$1:$収録番号.$B$9];2;0)" office:value-type="float" office:value="15" calcext:value-type="float">
            <text:p>15</text:p>
          </table:table-cell>
          <table:table-cell office:value-type="string" calcext:value-type="string">
            <text:p>R</text:p>
          </table:table-cell>
          <table:table-cell table:formula="of:=VLOOKUP([.I59];[$レアリティ番号.$A$1:$レアリティ番号.$B$4];2;0)" office:value-type="float" office:value="2" calcext:value-type="float">
            <text:p>2</text:p>
          </table:table-cell>
          <table:table-cell office:value-type="string" calcext:value-type="string">
            <text:p>イジン</text:p>
          </table:table-cell>
          <table:table-cell table:formula="of:=VLOOKUP([.K59];[$種類番号.$A$1:$種類番号.$B$4];2;0)" office:value-type="float" office:value="1" calcext:value-type="float">
            <text:p>1</text:p>
          </table:table-cell>
          <table:table-cell office:value-type="string" calcext:value-type="string">
            <text:p>赤</text:p>
          </table:table-cell>
          <table:table-cell table:formula="of:=VLOOKUP([.M59];[$色番号.$A$1:$色番号.$B$10];2;0)" office:value-type="float" office:value="1" calcext:value-type="float">
            <text:p>1</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9];[$特性番号.$A$1:$特性番号.$B$8];2;0);0)" office:value-type="float" office:value="0" calcext:value-type="float">
            <text:p>0</text:p>
          </table:table-cell>
          <table:table-cell office:value-type="string" calcext:value-type="string">
            <text:p>トリプルプレッシャー¶戦場に置かれたとき、相手の手札が6枚以上なら発動する。このターンの間「即応」を得る。</text:p>
          </table:table-cell>
          <table:table-cell table:style-name="ce8" table:formula="of:=NA()" office:value-type="string" office:string-value="" calcext:value-type="error">
            <text:p>#N/A</text:p>
          </table:table-cell>
          <table:table-cell table:formula="of:=IFERROR(VLOOKUP([.$V59];[$遺業能力番号.$A$1:$遺業能力番号.$B$9];2;0);0)" office:value-type="float" office:value="0" calcext:value-type="float">
            <text:p>0</text:p>
          </table:table-cell>
          <table:table-cell office:value-type="string" calcext:value-type="string">
            <text:p>https://one-draw.jp/ijinden/cardlist/001/card/01_019.png</text:p>
          </table:table-cell>
          <table:table-cell table:formula="of:=CONCATENATE([$JSON.$A$1];[.$C59];[$JSON.$B$1];[.$E59];[$JSON.$C$1];[.$F59];[$JSON.$D$1];IF(ISNA([.$S59]);&quot;null&quot;;&quot;&quot;&quot;&quot;&amp;[.$S59]&amp;&quot;&quot;&quot;&quot;);[$JSON.$E$1];[.$U59];[$JSON.$F$1];IF(ISNA([.$V59]);&quot;null&quot;;&quot;&quot;&quot;&quot;&amp;[.$V59]&amp;&quot;&quot;&quot;&quot;);[$JSON.$G$1];[.$X59];[$JSON.$H$1];[.$H59];[$JSON.$I$1];[.J59];[$JSON.$J$1];[.$L59];[$JSON.$K$1];[.$O59];[$JSON.$L$1];[.$N59];[$JSON.$M$1];[.$R59];[$JSON.$N$1];[.$T59];[$JSON.$O$1];[.$W59];[$JSON.$P$1];[.$A59];[$JSON.$Q$1];[.$B59];[$JSON.$R$1])" office:value-type="string" office:string-value="{&quot;id&quot;:&quot;1-19&quot;,&quot;name&quot;:&quot;ガイウス・ユリウス・カエサル&quot;,&quot;kana&quot;:&quot;がいうすゆりうすかえさる&quot;,&quot;traitText&quot;:null,&quot;ruleText&quot;:&quot;トリプルプレッシャー¶戦場に置かれたとき、相手の手札が6枚以上なら発動する。このターンの間「即応」を得る。&quot;,&quot;legacyText&quot;:null,&quot;imageUrl&quot;:&quot;https://one-draw.jp/ijinden/cardlist/001/card/01_019.png&quot;,&quot;expansion&quot;:15,&quot;rarity&quot;:2,&quot;type&quot;:1,&quot;level&quot;:7,&quot;color&quot;:1,&quot;term&quot;:0,&quot;trait&quot;:0,&quot;legacy&quot;:0,&quot;orderTable&quot;:58,&quot;orderDeck&quot;:203}," calcext:value-type="string">
            <text:p>{"id":"1-19","name":"ガイウス・ユリウス・カエサル","kana":"がいうすゆりうすかえさる","traitText":null,"ruleText":"トリプルプレッシャー¶戦場に置かれたとき、相手の手札が6枚以上なら発動する。このターンの間「即応」を得る。","legacyText":null,"imageUrl":"https://one-draw.jp/ijinden/cardlist/001/card/01_019.png","expansion":15,"rarity":2,"type":1,"level":7,"color":1,"term":0,"trait":0,"legacy":0,"orderTable":58,"orderDeck":203},</text:p>
          </table:table-cell>
          <table:table-cell table:number-columns-repeated="16347"/>
        </table:table-row>
        <table:table-row table:style-name="ro2">
          <table:table-cell office:value-type="float" office:value="59" calcext:value-type="float">
            <text:p>59</text:p>
          </table:table-cell>
          <table:table-cell office:value-type="float" office:value="7" calcext:value-type="float">
            <text:p>7</text:p>
          </table:table-cell>
          <table:table-cell office:value-type="string" calcext:value-type="string">
            <text:p>1-20</text:p>
          </table:table-cell>
          <table:table-cell office:value-type="float" office:value="20" calcext:value-type="float">
            <text:p>20</text:p>
          </table:table-cell>
          <table:table-cell office:value-type="string" calcext:value-type="string">
            <text:p>ハンス・アクセル・フォン・フェルセン</text:p>
          </table:table-cell>
          <table:table-cell office:value-type="string" calcext:value-type="string">
            <text:p>はんすあくせるふぉんふぇるせん</text:p>
          </table:table-cell>
          <table:table-cell office:value-type="string" calcext:value-type="string">
            <text:p>第１弾ブースターパック</text:p>
          </table:table-cell>
          <table:table-cell table:formula="of:=VLOOKUP([.G60];[$収録番号.$A$1:$収録番号.$B$9];2;0)" office:value-type="float" office:value="15" calcext:value-type="float">
            <text:p>15</text:p>
          </table:table-cell>
          <table:table-cell office:value-type="string" calcext:value-type="string">
            <text:p>N</text:p>
          </table:table-cell>
          <table:table-cell table:formula="of:=VLOOKUP([.I60];[$レアリティ番号.$A$1:$レアリティ番号.$B$4];2;0)" office:value-type="float" office:value="1" calcext:value-type="float">
            <text:p>1</text:p>
          </table:table-cell>
          <table:table-cell office:value-type="string" calcext:value-type="string">
            <text:p>イジン</text:p>
          </table:table-cell>
          <table:table-cell table:formula="of:=VLOOKUP([.K60];[$種類番号.$A$1:$種類番号.$B$4];2;0)" office:value-type="float" office:value="1" calcext:value-type="float">
            <text:p>1</text:p>
          </table:table-cell>
          <table:table-cell office:value-type="string" calcext:value-type="string">
            <text:p>青</text:p>
          </table:table-cell>
          <table:table-cell table:formula="of:=VLOOKUP([.M60];[$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0];[$特性番号.$A$1:$特性番号.$B$8];2;0);0)" office:value-type="float" office:value="0" calcext:value-type="float">
            <text:p>0</text:p>
          </table:table-cell>
          <table:table-cell office:value-type="string" calcext:value-type="string">
            <text:p>ブロッカーになったとき、1ドローする。¶相手の戦場の「即応」を持つイジンがアタッカーになったとき、これを起こす。</text:p>
          </table:table-cell>
          <table:table-cell table:style-name="ce8" office:value-type="string" calcext:value-type="string">
            <text:p>1ドローする</text:p>
          </table:table-cell>
          <table:table-cell table:formula="of:=IFERROR(VLOOKUP([.$V60];[$遺業能力番号.$A$1:$遺業能力番号.$B$9];2;0);0)" office:value-type="float" office:value="4" calcext:value-type="float">
            <text:p>4</text:p>
          </table:table-cell>
          <table:table-cell office:value-type="string" calcext:value-type="string">
            <text:p>https://one-draw.jp/ijinden/cardlist/001/card/01_020.png</text:p>
          </table:table-cell>
          <table:table-cell table:formula="of:=CONCATENATE([$JSON.$A$1];[.$C60];[$JSON.$B$1];[.$E60];[$JSON.$C$1];[.$F60];[$JSON.$D$1];IF(ISNA([.$S60]);&quot;null&quot;;&quot;&quot;&quot;&quot;&amp;[.$S60]&amp;&quot;&quot;&quot;&quot;);[$JSON.$E$1];[.$U60];[$JSON.$F$1];IF(ISNA([.$V60]);&quot;null&quot;;&quot;&quot;&quot;&quot;&amp;[.$V60]&amp;&quot;&quot;&quot;&quot;);[$JSON.$G$1];[.$X60];[$JSON.$H$1];[.$H60];[$JSON.$I$1];[.J60];[$JSON.$J$1];[.$L60];[$JSON.$K$1];[.$O60];[$JSON.$L$1];[.$N60];[$JSON.$M$1];[.$R60];[$JSON.$N$1];[.$T60];[$JSON.$O$1];[.$W60];[$JSON.$P$1];[.$A60];[$JSON.$Q$1];[.$B60];[$JSON.$R$1])" office:value-type="string" office:string-value="{&quot;id&quot;:&quot;1-20&quot;,&quot;name&quot;:&quot;ハンス・アクセル・フォン・フェルセン&quot;,&quot;kana&quot;:&quot;はんすあくせるふぉんふぇるせん&quot;,&quot;traitText&quot;:null,&quot;ruleText&quot;:&quot;ブロッカーになったとき、1ドローする。¶相手の戦場の「即応」を持つイジンがアタッカーになったとき、これを起こす。&quot;,&quot;legacyText&quot;:&quot;1ドローする&quot;,&quot;imageUrl&quot;:&quot;https://one-draw.jp/ijinden/cardlist/001/card/01_020.png&quot;,&quot;expansion&quot;:15,&quot;rarity&quot;:1,&quot;type&quot;:1,&quot;level&quot;:1,&quot;color&quot;:2,&quot;term&quot;:0,&quot;trait&quot;:0,&quot;legacy&quot;:4,&quot;orderTable&quot;:59,&quot;orderDeck&quot;:7}," calcext:value-type="string">
            <text:p>{"id":"1-20","name":"ハンス・アクセル・フォン・フェルセン","kana":"はんすあくせるふぉんふぇるせん","traitText":null,"ruleText":"ブロッカーになったとき、1ドローする。¶相手の戦場の「即応」を持つイジンがアタッカーになったとき、これを起こす。","legacyText":"1ドローする","imageUrl":"https://one-draw.jp/ijinden/cardlist/001/card/01_020.png","expansion":15,"rarity":1,"type":1,"level":1,"color":2,"term":0,"trait":0,"legacy":4,"orderTable":59,"orderDeck":7},</text:p>
          </table:table-cell>
          <table:table-cell table:number-columns-repeated="16347"/>
        </table:table-row>
        <table:table-row table:style-name="ro2">
          <table:table-cell office:value-type="float" office:value="60" calcext:value-type="float">
            <text:p>60</text:p>
          </table:table-cell>
          <table:table-cell office:value-type="float" office:value="34" calcext:value-type="float">
            <text:p>34</text:p>
          </table:table-cell>
          <table:table-cell office:value-type="string" calcext:value-type="string">
            <text:p>1-21</text:p>
          </table:table-cell>
          <table:table-cell office:value-type="float" office:value="21" calcext:value-type="float">
            <text:p>21</text:p>
          </table:table-cell>
          <table:table-cell office:value-type="string" calcext:value-type="string">
            <text:p>鑑真</text:p>
          </table:table-cell>
          <table:table-cell office:value-type="string" calcext:value-type="string">
            <text:p>がんじん</text:p>
          </table:table-cell>
          <table:table-cell office:value-type="string" calcext:value-type="string">
            <text:p>第１弾ブースターパック</text:p>
          </table:table-cell>
          <table:table-cell table:formula="of:=VLOOKUP([.G61];[$収録番号.$A$1:$収録番号.$B$9];2;0)" office:value-type="float" office:value="15" calcext:value-type="float">
            <text:p>15</text:p>
          </table:table-cell>
          <table:table-cell office:value-type="string" calcext:value-type="string">
            <text:p>N</text:p>
          </table:table-cell>
          <table:table-cell table:formula="of:=VLOOKUP([.I61];[$レアリティ番号.$A$1:$レアリティ番号.$B$4];2;0)" office:value-type="float" office:value="1" calcext:value-type="float">
            <text:p>1</text:p>
          </table:table-cell>
          <table:table-cell office:value-type="string" calcext:value-type="string">
            <text:p>イジン</text:p>
          </table:table-cell>
          <table:table-cell table:formula="of:=VLOOKUP([.K61];[$種類番号.$A$1:$種類番号.$B$4];2;0)" office:value-type="float" office:value="1" calcext:value-type="float">
            <text:p>1</text:p>
          </table:table-cell>
          <table:table-cell office:value-type="string" calcext:value-type="string">
            <text:p>青</text:p>
          </table:table-cell>
          <table:table-cell table:formula="of:=VLOOKUP([.M61];[$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航海</text:p>
          </table:table-cell>
          <table:table-cell table:formula="of:=IFERROR(VLOOKUP([.$Q61];[$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61];[$特性番号.$A$1:$特性番号.$B$8];2;0);0)" office:value-type="float" office:value="0" calcext:value-type="float">
            <text:p>0</text:p>
          </table:table-cell>
          <table:table-cell office:value-type="string" calcext:value-type="string">
            <text:p>航海 - アタッカーになったとき、1ドローして、これを破壊する。</text:p>
          </table:table-cell>
          <table:table-cell table:style-name="ce8" office:value-type="string" calcext:value-type="string">
            <text:p>1ドローする</text:p>
          </table:table-cell>
          <table:table-cell table:formula="of:=IFERROR(VLOOKUP([.$V61];[$遺業能力番号.$A$1:$遺業能力番号.$B$9];2;0);0)" office:value-type="float" office:value="4" calcext:value-type="float">
            <text:p>4</text:p>
          </table:table-cell>
          <table:table-cell office:value-type="string" calcext:value-type="string">
            <text:p>https://one-draw.jp/ijinden/cardlist/001/card/01_021.png</text:p>
          </table:table-cell>
          <table:table-cell table:formula="of:=CONCATENATE([$JSON.$A$1];[.$C61];[$JSON.$B$1];[.$E61];[$JSON.$C$1];[.$F61];[$JSON.$D$1];IF(ISNA([.$S61]);&quot;null&quot;;&quot;&quot;&quot;&quot;&amp;[.$S61]&amp;&quot;&quot;&quot;&quot;);[$JSON.$E$1];[.$U61];[$JSON.$F$1];IF(ISNA([.$V61]);&quot;null&quot;;&quot;&quot;&quot;&quot;&amp;[.$V61]&amp;&quot;&quot;&quot;&quot;);[$JSON.$G$1];[.$X61];[$JSON.$H$1];[.$H61];[$JSON.$I$1];[.J61];[$JSON.$J$1];[.$L61];[$JSON.$K$1];[.$O61];[$JSON.$L$1];[.$N61];[$JSON.$M$1];[.$R61];[$JSON.$N$1];[.$T61];[$JSON.$O$1];[.$W61];[$JSON.$P$1];[.$A61];[$JSON.$Q$1];[.$B61];[$JSON.$R$1])" office:value-type="string" office:string-value="{&quot;id&quot;:&quot;1-21&quot;,&quot;name&quot;:&quot;鑑真&quot;,&quot;kana&quot;:&quot;がんじん&quot;,&quot;traitText&quot;:null,&quot;ruleText&quot;:&quot;航海 - アタッカーになったとき、1ドローして、これを破壊する。&quot;,&quot;legacyText&quot;:&quot;1ドローする&quot;,&quot;imageUrl&quot;:&quot;https://one-draw.jp/ijinden/cardlist/001/card/01_021.png&quot;,&quot;expansion&quot;:15,&quot;rarity&quot;:1,&quot;type&quot;:1,&quot;level&quot;:2,&quot;color&quot;:2,&quot;term&quot;:1,&quot;trait&quot;:0,&quot;legacy&quot;:4,&quot;orderTable&quot;:60,&quot;orderDeck&quot;:34}," calcext:value-type="string">
            <text:p>{"id":"1-21","name":"鑑真","kana":"がんじん","traitText":null,"ruleText":"航海 - アタッカーになったとき、1ドローして、これを破壊する。","legacyText":"1ドローする","imageUrl":"https://one-draw.jp/ijinden/cardlist/001/card/01_021.png","expansion":15,"rarity":1,"type":1,"level":2,"color":2,"term":1,"trait":0,"legacy":4,"orderTable":60,"orderDeck":34},</text:p>
          </table:table-cell>
          <table:table-cell table:number-columns-repeated="16347"/>
        </table:table-row>
        <table:table-row table:style-name="ro2">
          <table:table-cell office:value-type="float" office:value="61" calcext:value-type="float">
            <text:p>61</text:p>
          </table:table-cell>
          <table:table-cell office:value-type="float" office:value="35" calcext:value-type="float">
            <text:p>35</text:p>
          </table:table-cell>
          <table:table-cell office:value-type="string" calcext:value-type="string">
            <text:p>1-22</text:p>
          </table:table-cell>
          <table:table-cell office:value-type="float" office:value="22" calcext:value-type="float">
            <text:p>22</text:p>
          </table:table-cell>
          <table:table-cell office:value-type="string" calcext:value-type="string">
            <text:p>ジャンヌ・ダルク</text:p>
          </table:table-cell>
          <table:table-cell office:value-type="string" calcext:value-type="string">
            <text:p>じゃんぬだるく</text:p>
          </table:table-cell>
          <table:table-cell office:value-type="string" calcext:value-type="string">
            <text:p>第１弾ブースターパック</text:p>
          </table:table-cell>
          <table:table-cell table:formula="of:=VLOOKUP([.G62];[$収録番号.$A$1:$収録番号.$B$9];2;0)" office:value-type="float" office:value="15" calcext:value-type="float">
            <text:p>15</text:p>
          </table:table-cell>
          <table:table-cell office:value-type="string" calcext:value-type="string">
            <text:p>N</text:p>
          </table:table-cell>
          <table:table-cell table:formula="of:=VLOOKUP([.I62];[$レアリティ番号.$A$1:$レアリティ番号.$B$4];2;0)" office:value-type="float" office:value="1" calcext:value-type="float">
            <text:p>1</text:p>
          </table:table-cell>
          <table:table-cell office:value-type="string" calcext:value-type="string">
            <text:p>イジン</text:p>
          </table:table-cell>
          <table:table-cell table:formula="of:=VLOOKUP([.K62];[$種類番号.$A$1:$種類番号.$B$4];2;0)" office:value-type="float" office:value="1" calcext:value-type="float">
            <text:p>1</text:p>
          </table:table-cell>
          <table:table-cell office:value-type="string" calcext:value-type="string">
            <text:p>青</text:p>
          </table:table-cell>
          <table:table-cell table:formula="of:=VLOOKUP([.M62];[$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2];[$特性番号.$A$1:$特性番号.$B$8];2;0);0)" office:value-type="float" office:value="0" calcext:value-type="float">
            <text:p>0</text:p>
          </table:table-cell>
          <table:table-cell office:value-type="string" calcext:value-type="string">
            <text:p>戦場に置かれたとき、自分の山札の上から3枚を墓地に置く。¶破壊されたとき、自分の手札1枚を墓地に置く。</text:p>
          </table:table-cell>
          <table:table-cell table:style-name="ce8" office:value-type="string" calcext:value-type="string">
            <text:p>魔力化</text:p>
          </table:table-cell>
          <table:table-cell table:formula="of:=IFERROR(VLOOKUP([.$V62];[$遺業能力番号.$A$1:$遺業能力番号.$B$9];2;0);0)" office:value-type="float" office:value="1" calcext:value-type="float">
            <text:p>1</text:p>
          </table:table-cell>
          <table:table-cell office:value-type="string" calcext:value-type="string">
            <text:p>https://one-draw.jp/ijinden/cardlist/001/card/01_022.png</text:p>
          </table:table-cell>
          <table:table-cell table:formula="of:=CONCATENATE([$JSON.$A$1];[.$C62];[$JSON.$B$1];[.$E62];[$JSON.$C$1];[.$F62];[$JSON.$D$1];IF(ISNA([.$S62]);&quot;null&quot;;&quot;&quot;&quot;&quot;&amp;[.$S62]&amp;&quot;&quot;&quot;&quot;);[$JSON.$E$1];[.$U62];[$JSON.$F$1];IF(ISNA([.$V62]);&quot;null&quot;;&quot;&quot;&quot;&quot;&amp;[.$V62]&amp;&quot;&quot;&quot;&quot;);[$JSON.$G$1];[.$X62];[$JSON.$H$1];[.$H62];[$JSON.$I$1];[.J62];[$JSON.$J$1];[.$L62];[$JSON.$K$1];[.$O62];[$JSON.$L$1];[.$N62];[$JSON.$M$1];[.$R62];[$JSON.$N$1];[.$T62];[$JSON.$O$1];[.$W62];[$JSON.$P$1];[.$A62];[$JSON.$Q$1];[.$B62];[$JSON.$R$1])" office:value-type="string" office:string-value="{&quot;id&quot;:&quot;1-22&quot;,&quot;name&quot;:&quot;ジャンヌ・ダルク&quot;,&quot;kana&quot;:&quot;じゃんぬだるく&quot;,&quot;traitText&quot;:null,&quot;ruleText&quot;:&quot;戦場に置かれたとき、自分の山札の上から3枚を墓地に置く。¶破壊されたとき、自分の手札1枚を墓地に置く。&quot;,&quot;legacyText&quot;:&quot;魔力化&quot;,&quot;imageUrl&quot;:&quot;https://one-draw.jp/ijinden/cardlist/001/card/01_022.png&quot;,&quot;expansion&quot;:15,&quot;rarity&quot;:1,&quot;type&quot;:1,&quot;level&quot;:2,&quot;color&quot;:2,&quot;term&quot;:0,&quot;trait&quot;:0,&quot;legacy&quot;:1,&quot;orderTable&quot;:61,&quot;orderDeck&quot;:35}," calcext:value-type="string">
            <text:p>{"id":"1-22","name":"ジャンヌ・ダルク","kana":"じゃんぬだるく","traitText":null,"ruleText":"戦場に置かれたとき、自分の山札の上から3枚を墓地に置く。¶破壊されたとき、自分の手札1枚を墓地に置く。","legacyText":"魔力化","imageUrl":"https://one-draw.jp/ijinden/cardlist/001/card/01_022.png","expansion":15,"rarity":1,"type":1,"level":2,"color":2,"term":0,"trait":0,"legacy":1,"orderTable":61,"orderDeck":35},</text:p>
          </table:table-cell>
          <table:table-cell table:number-columns-repeated="16347"/>
        </table:table-row>
        <table:table-row table:style-name="ro2">
          <table:table-cell office:value-type="float" office:value="62" calcext:value-type="float">
            <text:p>62</text:p>
          </table:table-cell>
          <table:table-cell office:value-type="float" office:value="36" calcext:value-type="float">
            <text:p>36</text:p>
          </table:table-cell>
          <table:table-cell office:value-type="string" calcext:value-type="string">
            <text:p>1-23</text:p>
          </table:table-cell>
          <table:table-cell office:value-type="float" office:value="23" calcext:value-type="float">
            <text:p>23</text:p>
          </table:table-cell>
          <table:table-cell office:value-type="string" calcext:value-type="string">
            <text:p>ドナテッロ</text:p>
          </table:table-cell>
          <table:table-cell office:value-type="string" calcext:value-type="string">
            <text:p>どなてっろ</text:p>
          </table:table-cell>
          <table:table-cell office:value-type="string" calcext:value-type="string">
            <text:p>第１弾ブースターパック</text:p>
          </table:table-cell>
          <table:table-cell table:formula="of:=VLOOKUP([.G63];[$収録番号.$A$1:$収録番号.$B$9];2;0)" office:value-type="float" office:value="15" calcext:value-type="float">
            <text:p>15</text:p>
          </table:table-cell>
          <table:table-cell office:value-type="string" calcext:value-type="string">
            <text:p>N</text:p>
          </table:table-cell>
          <table:table-cell table:formula="of:=VLOOKUP([.I63];[$レアリティ番号.$A$1:$レアリティ番号.$B$4];2;0)" office:value-type="float" office:value="1" calcext:value-type="float">
            <text:p>1</text:p>
          </table:table-cell>
          <table:table-cell office:value-type="string" calcext:value-type="string">
            <text:p>イジン</text:p>
          </table:table-cell>
          <table:table-cell table:formula="of:=VLOOKUP([.K63];[$種類番号.$A$1:$種類番号.$B$4];2;0)" office:value-type="float" office:value="1" calcext:value-type="float">
            <text:p>1</text:p>
          </table:table-cell>
          <table:table-cell office:value-type="string" calcext:value-type="string">
            <text:p>青</text:p>
          </table:table-cell>
          <table:table-cell table:formula="of:=VLOOKUP([.M63];[$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3];[$能力語番号.$A$1:$能力語番号.$B$10];2;0);0)" office:value-type="float" office:value="0" calcext:value-type="float">
            <text:p>0</text:p>
          </table:table-cell>
          <table:table-cell office:value-type="string" calcext:value-type="string">
            <text:p>美術</text:p>
          </table:table-cell>
          <table:table-cell table:formula="of:=IFERROR(VLOOKUP([.$S63];[$特性番号.$A$1:$特性番号.$B$8];2;0);0)" office:value-type="float" office:value="2" calcext:value-type="float">
            <text:p>2</text:p>
          </table:table-cell>
          <table:table-cell office:value-type="string" calcext:value-type="string">
            <text:p>戦場に置かれたとき、1ドローして、自分の手札1枚を墓地に置く。</text:p>
          </table:table-cell>
          <table:table-cell table:style-name="ce8" office:value-type="string" calcext:value-type="string">
            <text:p>1ドローする</text:p>
          </table:table-cell>
          <table:table-cell table:formula="of:=IFERROR(VLOOKUP([.$V63];[$遺業能力番号.$A$1:$遺業能力番号.$B$9];2;0);0)" office:value-type="float" office:value="4" calcext:value-type="float">
            <text:p>4</text:p>
          </table:table-cell>
          <table:table-cell office:value-type="string" calcext:value-type="string">
            <text:p>https://one-draw.jp/ijinden/cardlist/001/card/01_023.png</text:p>
          </table:table-cell>
          <table:table-cell table:formula="of:=CONCATENATE([$JSON.$A$1];[.$C63];[$JSON.$B$1];[.$E63];[$JSON.$C$1];[.$F63];[$JSON.$D$1];IF(ISNA([.$S63]);&quot;null&quot;;&quot;&quot;&quot;&quot;&amp;[.$S63]&amp;&quot;&quot;&quot;&quot;);[$JSON.$E$1];[.$U63];[$JSON.$F$1];IF(ISNA([.$V63]);&quot;null&quot;;&quot;&quot;&quot;&quot;&amp;[.$V63]&amp;&quot;&quot;&quot;&quot;);[$JSON.$G$1];[.$X63];[$JSON.$H$1];[.$H63];[$JSON.$I$1];[.J63];[$JSON.$J$1];[.$L63];[$JSON.$K$1];[.$O63];[$JSON.$L$1];[.$N63];[$JSON.$M$1];[.$R63];[$JSON.$N$1];[.$T63];[$JSON.$O$1];[.$W63];[$JSON.$P$1];[.$A63];[$JSON.$Q$1];[.$B63];[$JSON.$R$1])" office:value-type="string" office:string-value="{&quot;id&quot;:&quot;1-23&quot;,&quot;name&quot;:&quot;ドナテッロ&quot;,&quot;kana&quot;:&quot;どなてっろ&quot;,&quot;traitText&quot;:&quot;美術&quot;,&quot;ruleText&quot;:&quot;戦場に置かれたとき、1ドローして、自分の手札1枚を墓地に置く。&quot;,&quot;legacyText&quot;:&quot;1ドローする&quot;,&quot;imageUrl&quot;:&quot;https://one-draw.jp/ijinden/cardlist/001/card/01_023.png&quot;,&quot;expansion&quot;:15,&quot;rarity&quot;:1,&quot;type&quot;:1,&quot;level&quot;:2,&quot;color&quot;:2,&quot;term&quot;:0,&quot;trait&quot;:2,&quot;legacy&quot;:4,&quot;orderTable&quot;:62,&quot;orderDeck&quot;:36}," calcext:value-type="string">
            <text:p>{"id":"1-23","name":"ドナテッロ","kana":"どなてっろ","traitText":"美術","ruleText":"戦場に置かれたとき、1ドローして、自分の手札1枚を墓地に置く。","legacyText":"1ドローする","imageUrl":"https://one-draw.jp/ijinden/cardlist/001/card/01_023.png","expansion":15,"rarity":1,"type":1,"level":2,"color":2,"term":0,"trait":2,"legacy":4,"orderTable":62,"orderDeck":36},</text:p>
          </table:table-cell>
          <table:table-cell table:number-columns-repeated="16347"/>
        </table:table-row>
        <table:table-row table:style-name="ro2">
          <table:table-cell office:value-type="float" office:value="63" calcext:value-type="float">
            <text:p>63</text:p>
          </table:table-cell>
          <table:table-cell office:value-type="float" office:value="78" calcext:value-type="float">
            <text:p>78</text:p>
          </table:table-cell>
          <table:table-cell office:value-type="string" calcext:value-type="string">
            <text:p>1-24</text:p>
          </table:table-cell>
          <table:table-cell office:value-type="float" office:value="24" calcext:value-type="float">
            <text:p>24</text:p>
          </table:table-cell>
          <table:table-cell office:value-type="string" calcext:value-type="string">
            <text:p>孔子</text:p>
          </table:table-cell>
          <table:table-cell office:value-type="string" calcext:value-type="string">
            <text:p>こうし</text:p>
          </table:table-cell>
          <table:table-cell office:value-type="string" calcext:value-type="string">
            <text:p>第１弾ブースターパック</text:p>
          </table:table-cell>
          <table:table-cell table:formula="of:=VLOOKUP([.G64];[$収録番号.$A$1:$収録番号.$B$9];2;0)" office:value-type="float" office:value="15" calcext:value-type="float">
            <text:p>15</text:p>
          </table:table-cell>
          <table:table-cell office:value-type="string" calcext:value-type="string">
            <text:p>R</text:p>
          </table:table-cell>
          <table:table-cell table:formula="of:=VLOOKUP([.I64];[$レアリティ番号.$A$1:$レアリティ番号.$B$4];2;0)" office:value-type="float" office:value="2" calcext:value-type="float">
            <text:p>2</text:p>
          </table:table-cell>
          <table:table-cell office:value-type="string" calcext:value-type="string">
            <text:p>イジン</text:p>
          </table:table-cell>
          <table:table-cell table:formula="of:=VLOOKUP([.K64];[$種類番号.$A$1:$種類番号.$B$4];2;0)" office:value-type="float" office:value="1" calcext:value-type="float">
            <text:p>1</text:p>
          </table:table-cell>
          <table:table-cell office:value-type="string" calcext:value-type="string">
            <text:p>青</text:p>
          </table:table-cell>
          <table:table-cell table:formula="of:=VLOOKUP([.M64];[$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4];[$特性番号.$A$1:$特性番号.$B$8];2;0);0)" office:value-type="float" office:value="0" calcext:value-type="float">
            <text:p>0</text:p>
          </table:table-cell>
          <table:table-cell office:value-type="string" calcext:value-type="string">
            <text:p>ガーディアンが自分の戦場に置かれるたび、相手の戦場のガーディアン1体を寝かせる。¶これが戦場にいる間、自分の戦場のイジンは「ブロック+1000」を得る。</text:p>
          </table:table-cell>
          <table:table-cell table:style-name="ce8" office:value-type="string" calcext:value-type="string">
            <text:p>1ドローする</text:p>
          </table:table-cell>
          <table:table-cell table:formula="of:=IFERROR(VLOOKUP([.$V64];[$遺業能力番号.$A$1:$遺業能力番号.$B$9];2;0);0)" office:value-type="float" office:value="4" calcext:value-type="float">
            <text:p>4</text:p>
          </table:table-cell>
          <table:table-cell office:value-type="string" calcext:value-type="string">
            <text:p>https://one-draw.jp/ijinden/cardlist/001/card/01_024.png</text:p>
          </table:table-cell>
          <table:table-cell table:formula="of:=CONCATENATE([$JSON.$A$1];[.$C64];[$JSON.$B$1];[.$E64];[$JSON.$C$1];[.$F64];[$JSON.$D$1];IF(ISNA([.$S64]);&quot;null&quot;;&quot;&quot;&quot;&quot;&amp;[.$S64]&amp;&quot;&quot;&quot;&quot;);[$JSON.$E$1];[.$U64];[$JSON.$F$1];IF(ISNA([.$V64]);&quot;null&quot;;&quot;&quot;&quot;&quot;&amp;[.$V64]&amp;&quot;&quot;&quot;&quot;);[$JSON.$G$1];[.$X64];[$JSON.$H$1];[.$H64];[$JSON.$I$1];[.J64];[$JSON.$J$1];[.$L64];[$JSON.$K$1];[.$O64];[$JSON.$L$1];[.$N64];[$JSON.$M$1];[.$R64];[$JSON.$N$1];[.$T64];[$JSON.$O$1];[.$W64];[$JSON.$P$1];[.$A64];[$JSON.$Q$1];[.$B64];[$JSON.$R$1])" office:value-type="string" office:string-value="{&quot;id&quot;:&quot;1-24&quot;,&quot;name&quot;:&quot;孔子&quot;,&quot;kana&quot;:&quot;こうし&quot;,&quot;traitText&quot;:null,&quot;ruleText&quot;:&quot;ガーディアンが自分の戦場に置かれるたび、相手の戦場のガーディアン1体を寝かせる。¶これが戦場にいる間、自分の戦場のイジンは「ブロック+1000」を得る。&quot;,&quot;legacyText&quot;:&quot;1ドローする&quot;,&quot;imageUrl&quot;:&quot;https://one-draw.jp/ijinden/cardlist/001/card/01_024.png&quot;,&quot;expansion&quot;:15,&quot;rarity&quot;:2,&quot;type&quot;:1,&quot;level&quot;:3,&quot;color&quot;:2,&quot;term&quot;:0,&quot;trait&quot;:0,&quot;legacy&quot;:4,&quot;orderTable&quot;:63,&quot;orderDeck&quot;:78}," calcext:value-type="string">
            <text:p>{"id":"1-24","name":"孔子","kana":"こうし","traitText":null,"ruleText":"ガーディアンが自分の戦場に置かれるたび、相手の戦場のガーディアン1体を寝かせる。¶これが戦場にいる間、自分の戦場のイジンは「ブロック+1000」を得る。","legacyText":"1ドローする","imageUrl":"https://one-draw.jp/ijinden/cardlist/001/card/01_024.png","expansion":15,"rarity":2,"type":1,"level":3,"color":2,"term":0,"trait":0,"legacy":4,"orderTable":63,"orderDeck":78},</text:p>
          </table:table-cell>
          <table:table-cell table:number-columns-repeated="16347"/>
        </table:table-row>
        <table:table-row table:style-name="ro2">
          <table:table-cell office:value-type="float" office:value="64" calcext:value-type="float">
            <text:p>64</text:p>
          </table:table-cell>
          <table:table-cell office:value-type="float" office:value="155" calcext:value-type="float">
            <text:p>155</text:p>
          </table:table-cell>
          <table:table-cell office:value-type="string" calcext:value-type="string">
            <text:p>1-25</text:p>
          </table:table-cell>
          <table:table-cell office:value-type="float" office:value="25" calcext:value-type="float">
            <text:p>25</text:p>
          </table:table-cell>
          <table:table-cell office:value-type="string" calcext:value-type="string">
            <text:p>始皇帝</text:p>
          </table:table-cell>
          <table:table-cell office:value-type="string" calcext:value-type="string">
            <text:p>しこうてい</text:p>
          </table:table-cell>
          <table:table-cell office:value-type="string" calcext:value-type="string">
            <text:p>第１弾ブースターパック</text:p>
          </table:table-cell>
          <table:table-cell table:formula="of:=VLOOKUP([.G65];[$収録番号.$A$1:$収録番号.$B$9];2;0)" office:value-type="float" office:value="15" calcext:value-type="float">
            <text:p>15</text:p>
          </table:table-cell>
          <table:table-cell office:value-type="string" calcext:value-type="string">
            <text:p>N</text:p>
          </table:table-cell>
          <table:table-cell table:formula="of:=VLOOKUP([.I65];[$レアリティ番号.$A$1:$レアリティ番号.$B$4];2;0)" office:value-type="float" office:value="1" calcext:value-type="float">
            <text:p>1</text:p>
          </table:table-cell>
          <table:table-cell office:value-type="string" calcext:value-type="string">
            <text:p>イジン</text:p>
          </table:table-cell>
          <table:table-cell table:formula="of:=VLOOKUP([.K65];[$種類番号.$A$1:$種類番号.$B$4];2;0)" office:value-type="float" office:value="1" calcext:value-type="float">
            <text:p>1</text:p>
          </table:table-cell>
          <table:table-cell office:value-type="string" calcext:value-type="string">
            <text:p>青</text:p>
          </table:table-cell>
          <table:table-cell table:formula="of:=VLOOKUP([.M65];[$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5];[$特性番号.$A$1:$特性番号.$B$8];2;0);0)" office:value-type="float" office:value="0" calcext:value-type="float">
            <text:p>0</text:p>
          </table:table-cell>
          <table:table-cell office:value-type="string" calcext:value-type="string">
            <text:p>戦場に置かれたとき、自分の魔力ゾーンのマリョク1つを裏にして発動できる。相手の魔力ゾーンのマリョク1つを裏にする。¶これが戦場にいる間「執筆」は発動しない。</text:p>
          </table:table-cell>
          <table:table-cell table:style-name="ce8" table:formula="of:=NA()" office:value-type="string" office:string-value="" calcext:value-type="error">
            <text:p>#N/A</text:p>
          </table:table-cell>
          <table:table-cell table:formula="of:=IFERROR(VLOOKUP([.$V65];[$遺業能力番号.$A$1:$遺業能力番号.$B$9];2;0);0)" office:value-type="float" office:value="0" calcext:value-type="float">
            <text:p>0</text:p>
          </table:table-cell>
          <table:table-cell office:value-type="string" calcext:value-type="string">
            <text:p>https://one-draw.jp/ijinden/cardlist/001/card/01_025.png</text:p>
          </table:table-cell>
          <table:table-cell table:formula="of:=CONCATENATE([$JSON.$A$1];[.$C65];[$JSON.$B$1];[.$E65];[$JSON.$C$1];[.$F65];[$JSON.$D$1];IF(ISNA([.$S65]);&quot;null&quot;;&quot;&quot;&quot;&quot;&amp;[.$S65]&amp;&quot;&quot;&quot;&quot;);[$JSON.$E$1];[.$U65];[$JSON.$F$1];IF(ISNA([.$V65]);&quot;null&quot;;&quot;&quot;&quot;&quot;&amp;[.$V65]&amp;&quot;&quot;&quot;&quot;);[$JSON.$G$1];[.$X65];[$JSON.$H$1];[.$H65];[$JSON.$I$1];[.J65];[$JSON.$J$1];[.$L65];[$JSON.$K$1];[.$O65];[$JSON.$L$1];[.$N65];[$JSON.$M$1];[.$R65];[$JSON.$N$1];[.$T65];[$JSON.$O$1];[.$W65];[$JSON.$P$1];[.$A65];[$JSON.$Q$1];[.$B65];[$JSON.$R$1])" office:value-type="string" office:string-value="{&quot;id&quot;:&quot;1-25&quot;,&quot;name&quot;:&quot;始皇帝&quot;,&quot;kana&quot;:&quot;しこうてい&quot;,&quot;traitText&quot;:null,&quot;ruleText&quot;:&quot;戦場に置かれたとき、自分の魔力ゾーンのマリョク1つを裏にして発動できる。相手の魔力ゾーンのマリョク1つを裏にする。¶これが戦場にいる間「執筆」は発動しない。&quot;,&quot;legacyText&quot;:null,&quot;imageUrl&quot;:&quot;https://one-draw.jp/ijinden/cardlist/001/card/01_025.png&quot;,&quot;expansion&quot;:15,&quot;rarity&quot;:1,&quot;type&quot;:1,&quot;level&quot;:5,&quot;color&quot;:2,&quot;term&quot;:0,&quot;trait&quot;:0,&quot;legacy&quot;:0,&quot;orderTable&quot;:64,&quot;orderDeck&quot;:155}," calcext:value-type="string">
            <text:p>{"id":"1-25","name":"始皇帝","kana":"しこうてい","traitText":null,"ruleText":"戦場に置かれたとき、自分の魔力ゾーンのマリョク1つを裏にして発動できる。相手の魔力ゾーンのマリョク1つを裏にする。¶これが戦場にいる間「執筆」は発動しない。","legacyText":null,"imageUrl":"https://one-draw.jp/ijinden/cardlist/001/card/01_025.png","expansion":15,"rarity":1,"type":1,"level":5,"color":2,"term":0,"trait":0,"legacy":0,"orderTable":64,"orderDeck":155},</text:p>
          </table:table-cell>
          <table:table-cell table:number-columns-repeated="16347"/>
        </table:table-row>
        <table:table-row table:style-name="ro2">
          <table:table-cell office:value-type="float" office:value="65" calcext:value-type="float">
            <text:p>65</text:p>
          </table:table-cell>
          <table:table-cell office:value-type="float" office:value="79" calcext:value-type="float">
            <text:p>79</text:p>
          </table:table-cell>
          <table:table-cell office:value-type="string" calcext:value-type="string">
            <text:p>1-26</text:p>
          </table:table-cell>
          <table:table-cell office:value-type="float" office:value="26" calcext:value-type="float">
            <text:p>26</text:p>
          </table:table-cell>
          <table:table-cell office:value-type="string" calcext:value-type="string">
            <text:p>メアリー1世</text:p>
          </table:table-cell>
          <table:table-cell office:value-type="string" calcext:value-type="string">
            <text:p>めありーいっせい</text:p>
          </table:table-cell>
          <table:table-cell office:value-type="string" calcext:value-type="string">
            <text:p>第１弾ブースターパック</text:p>
          </table:table-cell>
          <table:table-cell table:formula="of:=VLOOKUP([.G66];[$収録番号.$A$1:$収録番号.$B$9];2;0)" office:value-type="float" office:value="15" calcext:value-type="float">
            <text:p>15</text:p>
          </table:table-cell>
          <table:table-cell office:value-type="string" calcext:value-type="string">
            <text:p>N</text:p>
          </table:table-cell>
          <table:table-cell table:formula="of:=VLOOKUP([.I66];[$レアリティ番号.$A$1:$レアリティ番号.$B$4];2;0)" office:value-type="float" office:value="1" calcext:value-type="float">
            <text:p>1</text:p>
          </table:table-cell>
          <table:table-cell office:value-type="string" calcext:value-type="string">
            <text:p>イジン</text:p>
          </table:table-cell>
          <table:table-cell table:formula="of:=VLOOKUP([.K66];[$種類番号.$A$1:$種類番号.$B$4];2;0)" office:value-type="float" office:value="1" calcext:value-type="float">
            <text:p>1</text:p>
          </table:table-cell>
          <table:table-cell office:value-type="string" calcext:value-type="string">
            <text:p>青</text:p>
          </table:table-cell>
          <table:table-cell table:formula="of:=VLOOKUP([.M66];[$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6];[$特性番号.$A$1:$特性番号.$B$8];2;0);0)" office:value-type="float" office:value="0" calcext:value-type="float">
            <text:p>0</text:p>
          </table:table-cell>
          <table:table-cell office:value-type="string" calcext:value-type="string">
            <text:p>戦場に置かれたとき、相手の手札を見てマリョクでないカード1つを墓地に置く。</text:p>
          </table:table-cell>
          <table:table-cell table:style-name="ce8" table:formula="of:=NA()" office:value-type="string" office:string-value="" calcext:value-type="error">
            <text:p>#N/A</text:p>
          </table:table-cell>
          <table:table-cell table:formula="of:=IFERROR(VLOOKUP([.$V66];[$遺業能力番号.$A$1:$遺業能力番号.$B$9];2;0);0)" office:value-type="float" office:value="0" calcext:value-type="float">
            <text:p>0</text:p>
          </table:table-cell>
          <table:table-cell office:value-type="string" calcext:value-type="string">
            <text:p>https://one-draw.jp/ijinden/cardlist/001/card/01_026.png</text:p>
          </table:table-cell>
          <table:table-cell table:formula="of:=CONCATENATE([$JSON.$A$1];[.$C66];[$JSON.$B$1];[.$E66];[$JSON.$C$1];[.$F66];[$JSON.$D$1];IF(ISNA([.$S66]);&quot;null&quot;;&quot;&quot;&quot;&quot;&amp;[.$S66]&amp;&quot;&quot;&quot;&quot;);[$JSON.$E$1];[.$U66];[$JSON.$F$1];IF(ISNA([.$V66]);&quot;null&quot;;&quot;&quot;&quot;&quot;&amp;[.$V66]&amp;&quot;&quot;&quot;&quot;);[$JSON.$G$1];[.$X66];[$JSON.$H$1];[.$H66];[$JSON.$I$1];[.J66];[$JSON.$J$1];[.$L66];[$JSON.$K$1];[.$O66];[$JSON.$L$1];[.$N66];[$JSON.$M$1];[.$R66];[$JSON.$N$1];[.$T66];[$JSON.$O$1];[.$W66];[$JSON.$P$1];[.$A66];[$JSON.$Q$1];[.$B66];[$JSON.$R$1])" office:value-type="string" office:string-value="{&quot;id&quot;:&quot;1-26&quot;,&quot;name&quot;:&quot;メアリー1世&quot;,&quot;kana&quot;:&quot;めありーいっせい&quot;,&quot;traitText&quot;:null,&quot;ruleText&quot;:&quot;戦場に置かれたとき、相手の手札を見てマリョクでないカード1つを墓地に置く。&quot;,&quot;legacyText&quot;:null,&quot;imageUrl&quot;:&quot;https://one-draw.jp/ijinden/cardlist/001/card/01_026.png&quot;,&quot;expansion&quot;:15,&quot;rarity&quot;:1,&quot;type&quot;:1,&quot;level&quot;:3,&quot;color&quot;:2,&quot;term&quot;:0,&quot;trait&quot;:0,&quot;legacy&quot;:0,&quot;orderTable&quot;:65,&quot;orderDeck&quot;:79}," calcext:value-type="string">
            <text:p>{"id":"1-26","name":"メアリー1世","kana":"めありーいっせい","traitText":null,"ruleText":"戦場に置かれたとき、相手の手札を見てマリョクでないカード1つを墓地に置く。","legacyText":null,"imageUrl":"https://one-draw.jp/ijinden/cardlist/001/card/01_026.png","expansion":15,"rarity":1,"type":1,"level":3,"color":2,"term":0,"trait":0,"legacy":0,"orderTable":65,"orderDeck":79},</text:p>
          </table:table-cell>
          <table:table-cell table:number-columns-repeated="16347"/>
        </table:table-row>
        <table:table-row table:style-name="ro2">
          <table:table-cell office:value-type="float" office:value="66" calcext:value-type="float">
            <text:p>66</text:p>
          </table:table-cell>
          <table:table-cell office:value-type="float" office:value="114" calcext:value-type="float">
            <text:p>114</text:p>
          </table:table-cell>
          <table:table-cell office:value-type="string" calcext:value-type="string">
            <text:p>1-27</text:p>
          </table:table-cell>
          <table:table-cell office:value-type="float" office:value="27" calcext:value-type="float">
            <text:p>27</text:p>
          </table:table-cell>
          <table:table-cell office:value-type="string" calcext:value-type="string">
            <text:p>玄宗</text:p>
          </table:table-cell>
          <table:table-cell office:value-type="string" calcext:value-type="string">
            <text:p>げんそう</text:p>
          </table:table-cell>
          <table:table-cell office:value-type="string" calcext:value-type="string">
            <text:p>第１弾ブースターパック</text:p>
          </table:table-cell>
          <table:table-cell table:formula="of:=VLOOKUP([.G67];[$収録番号.$A$1:$収録番号.$B$9];2;0)" office:value-type="float" office:value="15" calcext:value-type="float">
            <text:p>15</text:p>
          </table:table-cell>
          <table:table-cell office:value-type="string" calcext:value-type="string">
            <text:p>N</text:p>
          </table:table-cell>
          <table:table-cell table:formula="of:=VLOOKUP([.I67];[$レアリティ番号.$A$1:$レアリティ番号.$B$4];2;0)" office:value-type="float" office:value="1" calcext:value-type="float">
            <text:p>1</text:p>
          </table:table-cell>
          <table:table-cell office:value-type="string" calcext:value-type="string">
            <text:p>イジン</text:p>
          </table:table-cell>
          <table:table-cell table:formula="of:=VLOOKUP([.K67];[$種類番号.$A$1:$種類番号.$B$4];2;0)" office:value-type="float" office:value="1" calcext:value-type="float">
            <text:p>1</text:p>
          </table:table-cell>
          <table:table-cell office:value-type="string" calcext:value-type="string">
            <text:p>青</text:p>
          </table:table-cell>
          <table:table-cell table:formula="of:=VLOOKUP([.M67];[$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7];[$特性番号.$A$1:$特性番号.$B$8];2;0);0)" office:value-type="float" office:value="0" calcext:value-type="float">
            <text:p>0</text:p>
          </table:table-cell>
          <table:table-cell office:value-type="string" calcext:value-type="string">
            <text:p>イジンが相手の戦場に置かれるたび、自分の山札の上から1枚をガーディアンにして戦場に置く。¶これが戦場にいる間、自分の戦場のガーディアンはパワー6000以上のアタッカーを指定してブロッカーになれない。</text:p>
          </table:table-cell>
          <table:table-cell table:style-name="ce8" table:formula="of:=NA()" office:value-type="string" office:string-value="" calcext:value-type="error">
            <text:p>#N/A</text:p>
          </table:table-cell>
          <table:table-cell table:formula="of:=IFERROR(VLOOKUP([.$V67];[$遺業能力番号.$A$1:$遺業能力番号.$B$9];2;0);0)" office:value-type="float" office:value="0" calcext:value-type="float">
            <text:p>0</text:p>
          </table:table-cell>
          <table:table-cell office:value-type="string" calcext:value-type="string">
            <text:p>https://one-draw.jp/ijinden/cardlist/001/card/01_027.png</text:p>
          </table:table-cell>
          <table:table-cell table:formula="of:=CONCATENATE([$JSON.$A$1];[.$C67];[$JSON.$B$1];[.$E67];[$JSON.$C$1];[.$F67];[$JSON.$D$1];IF(ISNA([.$S67]);&quot;null&quot;;&quot;&quot;&quot;&quot;&amp;[.$S67]&amp;&quot;&quot;&quot;&quot;);[$JSON.$E$1];[.$U67];[$JSON.$F$1];IF(ISNA([.$V67]);&quot;null&quot;;&quot;&quot;&quot;&quot;&amp;[.$V67]&amp;&quot;&quot;&quot;&quot;);[$JSON.$G$1];[.$X67];[$JSON.$H$1];[.$H67];[$JSON.$I$1];[.J67];[$JSON.$J$1];[.$L67];[$JSON.$K$1];[.$O67];[$JSON.$L$1];[.$N67];[$JSON.$M$1];[.$R67];[$JSON.$N$1];[.$T67];[$JSON.$O$1];[.$W67];[$JSON.$P$1];[.$A67];[$JSON.$Q$1];[.$B67];[$JSON.$R$1])" office:value-type="string" office:string-value="{&quot;id&quot;:&quot;1-27&quot;,&quot;name&quot;:&quot;玄宗&quot;,&quot;kana&quot;:&quot;げんそう&quot;,&quot;traitText&quot;:null,&quot;ruleText&quot;:&quot;イジンが相手の戦場に置かれるたび、自分の山札の上から1枚をガーディアンにして戦場に置く。¶これが戦場にいる間、自分の戦場のガーディアンはパワー6000以上のアタッカーを指定してブロッカーになれない。&quot;,&quot;legacyText&quot;:null,&quot;imageUrl&quot;:&quot;https://one-draw.jp/ijinden/cardlist/001/card/01_027.png&quot;,&quot;expansion&quot;:15,&quot;rarity&quot;:1,&quot;type&quot;:1,&quot;level&quot;:4,&quot;color&quot;:2,&quot;term&quot;:0,&quot;trait&quot;:0,&quot;legacy&quot;:0,&quot;orderTable&quot;:66,&quot;orderDeck&quot;:114}," calcext:value-type="string">
            <text:p>{"id":"1-27","name":"玄宗","kana":"げんそう","traitText":null,"ruleText":"イジンが相手の戦場に置かれるたび、自分の山札の上から1枚をガーディアンにして戦場に置く。¶これが戦場にいる間、自分の戦場のガーディアンはパワー6000以上のアタッカーを指定してブロッカーになれない。","legacyText":null,"imageUrl":"https://one-draw.jp/ijinden/cardlist/001/card/01_027.png","expansion":15,"rarity":1,"type":1,"level":4,"color":2,"term":0,"trait":0,"legacy":0,"orderTable":66,"orderDeck":114},</text:p>
          </table:table-cell>
          <table:table-cell table:number-columns-repeated="16347"/>
        </table:table-row>
        <table:table-row table:style-name="ro2">
          <table:table-cell office:value-type="float" office:value="67" calcext:value-type="float">
            <text:p>67</text:p>
          </table:table-cell>
          <table:table-cell office:value-type="float" office:value="115" calcext:value-type="float">
            <text:p>115</text:p>
          </table:table-cell>
          <table:table-cell office:value-type="string" calcext:value-type="string">
            <text:p>1-28</text:p>
          </table:table-cell>
          <table:table-cell office:value-type="float" office:value="28" calcext:value-type="float">
            <text:p>28</text:p>
          </table:table-cell>
          <table:table-cell office:value-type="string" calcext:value-type="string">
            <text:p>シャルル7世</text:p>
          </table:table-cell>
          <table:table-cell office:value-type="string" calcext:value-type="string">
            <text:p>しゃるるななせい</text:p>
          </table:table-cell>
          <table:table-cell office:value-type="string" calcext:value-type="string">
            <text:p>第１弾ブースターパック</text:p>
          </table:table-cell>
          <table:table-cell table:formula="of:=VLOOKUP([.G68];[$収録番号.$A$1:$収録番号.$B$9];2;0)" office:value-type="float" office:value="15" calcext:value-type="float">
            <text:p>15</text:p>
          </table:table-cell>
          <table:table-cell office:value-type="string" calcext:value-type="string">
            <text:p>N</text:p>
          </table:table-cell>
          <table:table-cell table:formula="of:=VLOOKUP([.I68];[$レアリティ番号.$A$1:$レアリティ番号.$B$4];2;0)" office:value-type="float" office:value="1" calcext:value-type="float">
            <text:p>1</text:p>
          </table:table-cell>
          <table:table-cell office:value-type="string" calcext:value-type="string">
            <text:p>イジン</text:p>
          </table:table-cell>
          <table:table-cell table:formula="of:=VLOOKUP([.K68];[$種類番号.$A$1:$種類番号.$B$4];2;0)" office:value-type="float" office:value="1" calcext:value-type="float">
            <text:p>1</text:p>
          </table:table-cell>
          <table:table-cell office:value-type="string" calcext:value-type="string">
            <text:p>青</text:p>
          </table:table-cell>
          <table:table-cell table:formula="of:=VLOOKUP([.M68];[$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8];[$特性番号.$A$1:$特性番号.$B$8];2;0);0)" office:value-type="float" office:value="0" calcext:value-type="float">
            <text:p>0</text:p>
          </table:table-cell>
          <table:table-cell office:value-type="string" calcext:value-type="string">
            <text:p>自分の墓地のイジン1体につき「パワー+500」を得る。¶相手の戦場のガーディアンが破壊されるたび、1ドローする。</text:p>
          </table:table-cell>
          <table:table-cell table:style-name="ce8" table:formula="of:=NA()" office:value-type="string" office:string-value="" calcext:value-type="error">
            <text:p>#N/A</text:p>
          </table:table-cell>
          <table:table-cell table:formula="of:=IFERROR(VLOOKUP([.$V68];[$遺業能力番号.$A$1:$遺業能力番号.$B$9];2;0);0)" office:value-type="float" office:value="0" calcext:value-type="float">
            <text:p>0</text:p>
          </table:table-cell>
          <table:table-cell office:value-type="string" calcext:value-type="string">
            <text:p>https://one-draw.jp/ijinden/cardlist/001/card/01_028.png</text:p>
          </table:table-cell>
          <table:table-cell table:formula="of:=CONCATENATE([$JSON.$A$1];[.$C68];[$JSON.$B$1];[.$E68];[$JSON.$C$1];[.$F68];[$JSON.$D$1];IF(ISNA([.$S68]);&quot;null&quot;;&quot;&quot;&quot;&quot;&amp;[.$S68]&amp;&quot;&quot;&quot;&quot;);[$JSON.$E$1];[.$U68];[$JSON.$F$1];IF(ISNA([.$V68]);&quot;null&quot;;&quot;&quot;&quot;&quot;&amp;[.$V68]&amp;&quot;&quot;&quot;&quot;);[$JSON.$G$1];[.$X68];[$JSON.$H$1];[.$H68];[$JSON.$I$1];[.J68];[$JSON.$J$1];[.$L68];[$JSON.$K$1];[.$O68];[$JSON.$L$1];[.$N68];[$JSON.$M$1];[.$R68];[$JSON.$N$1];[.$T68];[$JSON.$O$1];[.$W68];[$JSON.$P$1];[.$A68];[$JSON.$Q$1];[.$B68];[$JSON.$R$1])" office:value-type="string" office:string-value="{&quot;id&quot;:&quot;1-28&quot;,&quot;name&quot;:&quot;シャルル7世&quot;,&quot;kana&quot;:&quot;しゃるるななせい&quot;,&quot;traitText&quot;:null,&quot;ruleText&quot;:&quot;自分の墓地のイジン1体につき「パワー+500」を得る。¶相手の戦場のガーディアンが破壊されるたび、1ドローする。&quot;,&quot;legacyText&quot;:null,&quot;imageUrl&quot;:&quot;https://one-draw.jp/ijinden/cardlist/001/card/01_028.png&quot;,&quot;expansion&quot;:15,&quot;rarity&quot;:1,&quot;type&quot;:1,&quot;level&quot;:4,&quot;color&quot;:2,&quot;term&quot;:0,&quot;trait&quot;:0,&quot;legacy&quot;:0,&quot;orderTable&quot;:67,&quot;orderDeck&quot;:115}," calcext:value-type="string">
            <text:p>{"id":"1-28","name":"シャルル7世","kana":"しゃるるななせい","traitText":null,"ruleText":"自分の墓地のイジン1体につき「パワー+500」を得る。¶相手の戦場のガーディアンが破壊されるたび、1ドローする。","legacyText":null,"imageUrl":"https://one-draw.jp/ijinden/cardlist/001/card/01_028.png","expansion":15,"rarity":1,"type":1,"level":4,"color":2,"term":0,"trait":0,"legacy":0,"orderTable":67,"orderDeck":115},</text:p>
          </table:table-cell>
          <table:table-cell table:number-columns-repeated="16347"/>
        </table:table-row>
        <table:table-row table:style-name="ro2">
          <table:table-cell office:value-type="float" office:value="68" calcext:value-type="float">
            <text:p>68</text:p>
          </table:table-cell>
          <table:table-cell office:value-type="float" office:value="116" calcext:value-type="float">
            <text:p>116</text:p>
          </table:table-cell>
          <table:table-cell office:value-type="string" calcext:value-type="string">
            <text:p>1-29</text:p>
          </table:table-cell>
          <table:table-cell office:value-type="float" office:value="29" calcext:value-type="float">
            <text:p>29</text:p>
          </table:table-cell>
          <table:table-cell office:value-type="string" calcext:value-type="string">
            <text:p>フランシスコ・ザビエル</text:p>
          </table:table-cell>
          <table:table-cell office:value-type="string" calcext:value-type="string">
            <text:p>ふらんしすこざびえる</text:p>
          </table:table-cell>
          <table:table-cell office:value-type="string" calcext:value-type="string">
            <text:p>第１弾ブースターパック</text:p>
          </table:table-cell>
          <table:table-cell table:formula="of:=VLOOKUP([.G69];[$収録番号.$A$1:$収録番号.$B$9];2;0)" office:value-type="float" office:value="15" calcext:value-type="float">
            <text:p>15</text:p>
          </table:table-cell>
          <table:table-cell office:value-type="string" calcext:value-type="string">
            <text:p>R</text:p>
          </table:table-cell>
          <table:table-cell table:formula="of:=VLOOKUP([.I69];[$レアリティ番号.$A$1:$レアリティ番号.$B$4];2;0)" office:value-type="float" office:value="2" calcext:value-type="float">
            <text:p>2</text:p>
          </table:table-cell>
          <table:table-cell office:value-type="string" calcext:value-type="string">
            <text:p>イジン</text:p>
          </table:table-cell>
          <table:table-cell table:formula="of:=VLOOKUP([.K69];[$種類番号.$A$1:$種類番号.$B$4];2;0)" office:value-type="float" office:value="1" calcext:value-type="float">
            <text:p>1</text:p>
          </table:table-cell>
          <table:table-cell office:value-type="string" calcext:value-type="string">
            <text:p>青</text:p>
          </table:table-cell>
          <table:table-cell table:formula="of:=VLOOKUP([.M69];[$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航海</text:p>
          </table:table-cell>
          <table:table-cell table:formula="of:=IFERROR(VLOOKUP([.$Q6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69];[$特性番号.$A$1:$特性番号.$B$8];2;0);0)" office:value-type="float" office:value="0" calcext:value-type="float">
            <text:p>0</text:p>
          </table:table-cell>
          <table:table-cell office:value-type="string" calcext:value-type="string">
            <text:p>航海 - アタッカーになったとき、自分の山札の上から1枚をガーディアンにして戦場に置く。</text:p>
          </table:table-cell>
          <table:table-cell table:style-name="ce8" table:formula="of:=NA()" office:value-type="string" office:string-value="" calcext:value-type="error">
            <text:p>#N/A</text:p>
          </table:table-cell>
          <table:table-cell table:formula="of:=IFERROR(VLOOKUP([.$V69];[$遺業能力番号.$A$1:$遺業能力番号.$B$9];2;0);0)" office:value-type="float" office:value="0" calcext:value-type="float">
            <text:p>0</text:p>
          </table:table-cell>
          <table:table-cell office:value-type="string" calcext:value-type="string">
            <text:p>https://one-draw.jp/ijinden/cardlist/001/card/01_029.png</text:p>
          </table:table-cell>
          <table:table-cell table:formula="of:=CONCATENATE([$JSON.$A$1];[.$C69];[$JSON.$B$1];[.$E69];[$JSON.$C$1];[.$F69];[$JSON.$D$1];IF(ISNA([.$S69]);&quot;null&quot;;&quot;&quot;&quot;&quot;&amp;[.$S69]&amp;&quot;&quot;&quot;&quot;);[$JSON.$E$1];[.$U69];[$JSON.$F$1];IF(ISNA([.$V69]);&quot;null&quot;;&quot;&quot;&quot;&quot;&amp;[.$V69]&amp;&quot;&quot;&quot;&quot;);[$JSON.$G$1];[.$X69];[$JSON.$H$1];[.$H69];[$JSON.$I$1];[.J69];[$JSON.$J$1];[.$L69];[$JSON.$K$1];[.$O69];[$JSON.$L$1];[.$N69];[$JSON.$M$1];[.$R69];[$JSON.$N$1];[.$T69];[$JSON.$O$1];[.$W69];[$JSON.$P$1];[.$A69];[$JSON.$Q$1];[.$B69];[$JSON.$R$1])" office:value-type="string" office:string-value="{&quot;id&quot;:&quot;1-29&quot;,&quot;name&quot;:&quot;フランシスコ・ザビエル&quot;,&quot;kana&quot;:&quot;ふらんしすこざびえる&quot;,&quot;traitText&quot;:null,&quot;ruleText&quot;:&quot;航海 - アタッカーになったとき、自分の山札の上から1枚をガーディアンにして戦場に置く。&quot;,&quot;legacyText&quot;:null,&quot;imageUrl&quot;:&quot;https://one-draw.jp/ijinden/cardlist/001/card/01_029.png&quot;,&quot;expansion&quot;:15,&quot;rarity&quot;:2,&quot;type&quot;:1,&quot;level&quot;:4,&quot;color&quot;:2,&quot;term&quot;:1,&quot;trait&quot;:0,&quot;legacy&quot;:0,&quot;orderTable&quot;:68,&quot;orderDeck&quot;:116}," calcext:value-type="string">
            <text:p>{"id":"1-29","name":"フランシスコ・ザビエル","kana":"ふらんしすこざびえる","traitText":null,"ruleText":"航海 - アタッカーになったとき、自分の山札の上から1枚をガーディアンにして戦場に置く。","legacyText":null,"imageUrl":"https://one-draw.jp/ijinden/cardlist/001/card/01_029.png","expansion":15,"rarity":2,"type":1,"level":4,"color":2,"term":1,"trait":0,"legacy":0,"orderTable":68,"orderDeck":116},</text:p>
          </table:table-cell>
          <table:table-cell table:number-columns-repeated="16347"/>
        </table:table-row>
        <table:table-row table:style-name="ro2">
          <table:table-cell office:value-type="float" office:value="69" calcext:value-type="float">
            <text:p>69</text:p>
          </table:table-cell>
          <table:table-cell office:value-type="float" office:value="156" calcext:value-type="float">
            <text:p>156</text:p>
          </table:table-cell>
          <table:table-cell office:value-type="string" calcext:value-type="string">
            <text:p>1-30</text:p>
          </table:table-cell>
          <table:table-cell office:value-type="float" office:value="30" calcext:value-type="float">
            <text:p>30</text:p>
          </table:table-cell>
          <table:table-cell office:value-type="string" calcext:value-type="string">
            <text:p>チンギス・ハン</text:p>
          </table:table-cell>
          <table:table-cell office:value-type="string" calcext:value-type="string">
            <text:p>ちんぎすはん</text:p>
          </table:table-cell>
          <table:table-cell office:value-type="string" calcext:value-type="string">
            <text:p>第１弾ブースターパック</text:p>
          </table:table-cell>
          <table:table-cell table:formula="of:=VLOOKUP([.G70];[$収録番号.$A$1:$収録番号.$B$9];2;0)" office:value-type="float" office:value="15" calcext:value-type="float">
            <text:p>15</text:p>
          </table:table-cell>
          <table:table-cell office:value-type="string" calcext:value-type="string">
            <text:p>R</text:p>
          </table:table-cell>
          <table:table-cell table:formula="of:=VLOOKUP([.I70];[$レアリティ番号.$A$1:$レアリティ番号.$B$4];2;0)" office:value-type="float" office:value="2" calcext:value-type="float">
            <text:p>2</text:p>
          </table:table-cell>
          <table:table-cell office:value-type="string" calcext:value-type="string">
            <text:p>イジン</text:p>
          </table:table-cell>
          <table:table-cell table:formula="of:=VLOOKUP([.K70];[$種類番号.$A$1:$種類番号.$B$4];2;0)" office:value-type="float" office:value="1" calcext:value-type="float">
            <text:p>1</text:p>
          </table:table-cell>
          <table:table-cell office:value-type="string" calcext:value-type="string">
            <text:p>青</text:p>
          </table:table-cell>
          <table:table-cell table:formula="of:=VLOOKUP([.M70];[$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70];[$特性番号.$A$1:$特性番号.$B$8];2;0);0)" office:value-type="float" office:value="0" calcext:value-type="float">
            <text:p>0</text:p>
          </table:table-cell>
          <table:table-cell office:value-type="string" calcext:value-type="string">
            <text:p>ダブルプレッシャー¶戦場に置かれたとき、魔力ゾーンの裏のカードすべてをガーディアンにして戦場に置く。</text:p>
          </table:table-cell>
          <table:table-cell table:style-name="ce8" table:formula="of:=NA()" office:value-type="string" office:string-value="" calcext:value-type="error">
            <text:p>#N/A</text:p>
          </table:table-cell>
          <table:table-cell table:formula="of:=IFERROR(VLOOKUP([.$V70];[$遺業能力番号.$A$1:$遺業能力番号.$B$9];2;0);0)" office:value-type="float" office:value="0" calcext:value-type="float">
            <text:p>0</text:p>
          </table:table-cell>
          <table:table-cell office:value-type="string" calcext:value-type="string">
            <text:p>https://one-draw.jp/ijinden/cardlist/001/card/01_030.png</text:p>
          </table:table-cell>
          <table:table-cell table:formula="of:=CONCATENATE([$JSON.$A$1];[.$C70];[$JSON.$B$1];[.$E70];[$JSON.$C$1];[.$F70];[$JSON.$D$1];IF(ISNA([.$S70]);&quot;null&quot;;&quot;&quot;&quot;&quot;&amp;[.$S70]&amp;&quot;&quot;&quot;&quot;);[$JSON.$E$1];[.$U70];[$JSON.$F$1];IF(ISNA([.$V70]);&quot;null&quot;;&quot;&quot;&quot;&quot;&amp;[.$V70]&amp;&quot;&quot;&quot;&quot;);[$JSON.$G$1];[.$X70];[$JSON.$H$1];[.$H70];[$JSON.$I$1];[.J70];[$JSON.$J$1];[.$L70];[$JSON.$K$1];[.$O70];[$JSON.$L$1];[.$N70];[$JSON.$M$1];[.$R70];[$JSON.$N$1];[.$T70];[$JSON.$O$1];[.$W70];[$JSON.$P$1];[.$A70];[$JSON.$Q$1];[.$B70];[$JSON.$R$1])" office:value-type="string" office:string-value="{&quot;id&quot;:&quot;1-30&quot;,&quot;name&quot;:&quot;チンギス・ハン&quot;,&quot;kana&quot;:&quot;ちんぎすはん&quot;,&quot;traitText&quot;:null,&quot;ruleText&quot;:&quot;ダブルプレッシャー¶戦場に置かれたとき、魔力ゾーンの裏のカードすべてをガーディアンにして戦場に置く。&quot;,&quot;legacyText&quot;:null,&quot;imageUrl&quot;:&quot;https://one-draw.jp/ijinden/cardlist/001/card/01_030.png&quot;,&quot;expansion&quot;:15,&quot;rarity&quot;:2,&quot;type&quot;:1,&quot;level&quot;:5,&quot;color&quot;:2,&quot;term&quot;:0,&quot;trait&quot;:0,&quot;legacy&quot;:0,&quot;orderTable&quot;:69,&quot;orderDeck&quot;:156}," calcext:value-type="string">
            <text:p>{"id":"1-30","name":"チンギス・ハン","kana":"ちんぎすはん","traitText":null,"ruleText":"ダブルプレッシャー¶戦場に置かれたとき、魔力ゾーンの裏のカードすべてをガーディアンにして戦場に置く。","legacyText":null,"imageUrl":"https://one-draw.jp/ijinden/cardlist/001/card/01_030.png","expansion":15,"rarity":2,"type":1,"level":5,"color":2,"term":0,"trait":0,"legacy":0,"orderTable":69,"orderDeck":156},</text:p>
          </table:table-cell>
          <table:table-cell table:number-columns-repeated="16347"/>
        </table:table-row>
        <table:table-row table:style-name="ro2">
          <table:table-cell office:value-type="float" office:value="70" calcext:value-type="float">
            <text:p>70</text:p>
          </table:table-cell>
          <table:table-cell office:value-type="float" office:value="157" calcext:value-type="float">
            <text:p>157</text:p>
          </table:table-cell>
          <table:table-cell office:value-type="string" calcext:value-type="string">
            <text:p>1-31</text:p>
          </table:table-cell>
          <table:table-cell office:value-type="float" office:value="31" calcext:value-type="float">
            <text:p>31</text:p>
          </table:table-cell>
          <table:table-cell office:value-type="string" calcext:value-type="string">
            <text:p>ミケランジェロ</text:p>
          </table:table-cell>
          <table:table-cell office:value-type="string" calcext:value-type="string">
            <text:p>みけらんじぇろ</text:p>
          </table:table-cell>
          <table:table-cell office:value-type="string" calcext:value-type="string">
            <text:p>第１弾ブースターパック</text:p>
          </table:table-cell>
          <table:table-cell table:formula="of:=VLOOKUP([.G71];[$収録番号.$A$1:$収録番号.$B$9];2;0)" office:value-type="float" office:value="15" calcext:value-type="float">
            <text:p>15</text:p>
          </table:table-cell>
          <table:table-cell office:value-type="string" calcext:value-type="string">
            <text:p>N</text:p>
          </table:table-cell>
          <table:table-cell table:formula="of:=VLOOKUP([.I71];[$レアリティ番号.$A$1:$レアリティ番号.$B$4];2;0)" office:value-type="float" office:value="1" calcext:value-type="float">
            <text:p>1</text:p>
          </table:table-cell>
          <table:table-cell office:value-type="string" calcext:value-type="string">
            <text:p>イジン</text:p>
          </table:table-cell>
          <table:table-cell table:formula="of:=VLOOKUP([.K71];[$種類番号.$A$1:$種類番号.$B$4];2;0)" office:value-type="float" office:value="1" calcext:value-type="float">
            <text:p>1</text:p>
          </table:table-cell>
          <table:table-cell office:value-type="string" calcext:value-type="string">
            <text:p>青</text:p>
          </table:table-cell>
          <table:table-cell table:formula="of:=VLOOKUP([.M71];[$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1];[$能力語番号.$A$1:$能力語番号.$B$10];2;0);0)" office:value-type="float" office:value="0" calcext:value-type="float">
            <text:p>0</text:p>
          </table:table-cell>
          <table:table-cell office:value-type="string" calcext:value-type="string">
            <text:p>美術</text:p>
          </table:table-cell>
          <table:table-cell table:formula="of:=IFERROR(VLOOKUP([.$S71];[$特性番号.$A$1:$特性番号.$B$8];2;0);0)" office:value-type="float" office:value="2" calcext:value-type="float">
            <text:p>2</text:p>
          </table:table-cell>
          <table:table-cell office:value-type="string" calcext:value-type="string">
            <text:p>戦場に置かれたとき、自分の墓地のカード1つをガーディアンにして戦場に置く。</text:p>
          </table:table-cell>
          <table:table-cell table:style-name="ce8" table:formula="of:=NA()" office:value-type="string" office:string-value="" calcext:value-type="error">
            <text:p>#N/A</text:p>
          </table:table-cell>
          <table:table-cell table:formula="of:=IFERROR(VLOOKUP([.$V71];[$遺業能力番号.$A$1:$遺業能力番号.$B$9];2;0);0)" office:value-type="float" office:value="0" calcext:value-type="float">
            <text:p>0</text:p>
          </table:table-cell>
          <table:table-cell office:value-type="string" calcext:value-type="string">
            <text:p>https://one-draw.jp/ijinden/cardlist/001/card/01_031.png</text:p>
          </table:table-cell>
          <table:table-cell table:formula="of:=CONCATENATE([$JSON.$A$1];[.$C71];[$JSON.$B$1];[.$E71];[$JSON.$C$1];[.$F71];[$JSON.$D$1];IF(ISNA([.$S71]);&quot;null&quot;;&quot;&quot;&quot;&quot;&amp;[.$S71]&amp;&quot;&quot;&quot;&quot;);[$JSON.$E$1];[.$U71];[$JSON.$F$1];IF(ISNA([.$V71]);&quot;null&quot;;&quot;&quot;&quot;&quot;&amp;[.$V71]&amp;&quot;&quot;&quot;&quot;);[$JSON.$G$1];[.$X71];[$JSON.$H$1];[.$H71];[$JSON.$I$1];[.J71];[$JSON.$J$1];[.$L71];[$JSON.$K$1];[.$O71];[$JSON.$L$1];[.$N71];[$JSON.$M$1];[.$R71];[$JSON.$N$1];[.$T71];[$JSON.$O$1];[.$W71];[$JSON.$P$1];[.$A71];[$JSON.$Q$1];[.$B71];[$JSON.$R$1])" office:value-type="string" office:string-value="{&quot;id&quot;:&quot;1-31&quot;,&quot;name&quot;:&quot;ミケランジェロ&quot;,&quot;kana&quot;:&quot;みけらんじぇろ&quot;,&quot;traitText&quot;:&quot;美術&quot;,&quot;ruleText&quot;:&quot;戦場に置かれたとき、自分の墓地のカード1つをガーディアンにして戦場に置く。&quot;,&quot;legacyText&quot;:null,&quot;imageUrl&quot;:&quot;https://one-draw.jp/ijinden/cardlist/001/card/01_031.png&quot;,&quot;expansion&quot;:15,&quot;rarity&quot;:1,&quot;type&quot;:1,&quot;level&quot;:5,&quot;color&quot;:2,&quot;term&quot;:0,&quot;trait&quot;:2,&quot;legacy&quot;:0,&quot;orderTable&quot;:70,&quot;orderDeck&quot;:157}," calcext:value-type="string">
            <text:p>{"id":"1-31","name":"ミケランジェロ","kana":"みけらんじぇろ","traitText":"美術","ruleText":"戦場に置かれたとき、自分の墓地のカード1つをガーディアンにして戦場に置く。","legacyText":null,"imageUrl":"https://one-draw.jp/ijinden/cardlist/001/card/01_031.png","expansion":15,"rarity":1,"type":1,"level":5,"color":2,"term":0,"trait":2,"legacy":0,"orderTable":70,"orderDeck":157},</text:p>
          </table:table-cell>
          <table:table-cell table:number-columns-repeated="16347"/>
        </table:table-row>
        <table:table-row table:style-name="ro2">
          <table:table-cell office:value-type="float" office:value="71" calcext:value-type="float">
            <text:p>71</text:p>
          </table:table-cell>
          <table:table-cell office:value-type="float" office:value="188" calcext:value-type="float">
            <text:p>188</text:p>
          </table:table-cell>
          <table:table-cell office:value-type="string" calcext:value-type="string">
            <text:p>1-32</text:p>
          </table:table-cell>
          <table:table-cell office:value-type="float" office:value="32" calcext:value-type="float">
            <text:p>32</text:p>
          </table:table-cell>
          <table:table-cell office:value-type="string" calcext:value-type="string">
            <text:p>マリー・アントワネット</text:p>
          </table:table-cell>
          <table:table-cell office:value-type="string" calcext:value-type="string">
            <text:p>まりーあんとわねっと</text:p>
          </table:table-cell>
          <table:table-cell office:value-type="string" calcext:value-type="string">
            <text:p>第１弾ブースターパック</text:p>
          </table:table-cell>
          <table:table-cell table:formula="of:=VLOOKUP([.G72];[$収録番号.$A$1:$収録番号.$B$9];2;0)" office:value-type="float" office:value="15" calcext:value-type="float">
            <text:p>15</text:p>
          </table:table-cell>
          <table:table-cell office:value-type="string" calcext:value-type="string">
            <text:p>N</text:p>
          </table:table-cell>
          <table:table-cell table:formula="of:=VLOOKUP([.I72];[$レアリティ番号.$A$1:$レアリティ番号.$B$4];2;0)" office:value-type="float" office:value="1" calcext:value-type="float">
            <text:p>1</text:p>
          </table:table-cell>
          <table:table-cell office:value-type="string" calcext:value-type="string">
            <text:p>イジン</text:p>
          </table:table-cell>
          <table:table-cell table:formula="of:=VLOOKUP([.K72];[$種類番号.$A$1:$種類番号.$B$4];2;0)" office:value-type="float" office:value="1" calcext:value-type="float">
            <text:p>1</text:p>
          </table:table-cell>
          <table:table-cell office:value-type="string" calcext:value-type="string">
            <text:p>青</text:p>
          </table:table-cell>
          <table:table-cell table:formula="of:=VLOOKUP([.M72];[$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72];[$特性番号.$A$1:$特性番号.$B$8];2;0);0)" office:value-type="float" office:value="0" calcext:value-type="float">
            <text:p>0</text:p>
          </table:table-cell>
          <table:table-cell office:value-type="string" calcext:value-type="string">
            <text:p>破壊されたとき、戦場のガーディアンすべてを寝かせる。</text:p>
          </table:table-cell>
          <table:table-cell table:style-name="ce8" office:value-type="string" calcext:value-type="string">
            <text:p>魔力化</text:p>
          </table:table-cell>
          <table:table-cell table:formula="of:=IFERROR(VLOOKUP([.$V72];[$遺業能力番号.$A$1:$遺業能力番号.$B$9];2;0);0)" office:value-type="float" office:value="1" calcext:value-type="float">
            <text:p>1</text:p>
          </table:table-cell>
          <table:table-cell office:value-type="string" calcext:value-type="string">
            <text:p>https://one-draw.jp/ijinden/cardlist/001/card/01_032.png</text:p>
          </table:table-cell>
          <table:table-cell table:formula="of:=CONCATENATE([$JSON.$A$1];[.$C72];[$JSON.$B$1];[.$E72];[$JSON.$C$1];[.$F72];[$JSON.$D$1];IF(ISNA([.$S72]);&quot;null&quot;;&quot;&quot;&quot;&quot;&amp;[.$S72]&amp;&quot;&quot;&quot;&quot;);[$JSON.$E$1];[.$U72];[$JSON.$F$1];IF(ISNA([.$V72]);&quot;null&quot;;&quot;&quot;&quot;&quot;&amp;[.$V72]&amp;&quot;&quot;&quot;&quot;);[$JSON.$G$1];[.$X72];[$JSON.$H$1];[.$H72];[$JSON.$I$1];[.J72];[$JSON.$J$1];[.$L72];[$JSON.$K$1];[.$O72];[$JSON.$L$1];[.$N72];[$JSON.$M$1];[.$R72];[$JSON.$N$1];[.$T72];[$JSON.$O$1];[.$W72];[$JSON.$P$1];[.$A72];[$JSON.$Q$1];[.$B72];[$JSON.$R$1])" office:value-type="string" office:string-value="{&quot;id&quot;:&quot;1-32&quot;,&quot;name&quot;:&quot;マリー・アントワネット&quot;,&quot;kana&quot;:&quot;まりーあんとわねっと&quot;,&quot;traitText&quot;:null,&quot;ruleText&quot;:&quot;破壊されたとき、戦場のガーディアンすべてを寝かせる。&quot;,&quot;legacyText&quot;:&quot;魔力化&quot;,&quot;imageUrl&quot;:&quot;https://one-draw.jp/ijinden/cardlist/001/card/01_032.png&quot;,&quot;expansion&quot;:15,&quot;rarity&quot;:1,&quot;type&quot;:1,&quot;level&quot;:6,&quot;color&quot;:2,&quot;term&quot;:0,&quot;trait&quot;:0,&quot;legacy&quot;:1,&quot;orderTable&quot;:71,&quot;orderDeck&quot;:188}," calcext:value-type="string">
            <text:p>{"id":"1-32","name":"マリー・アントワネット","kana":"まりーあんとわねっと","traitText":null,"ruleText":"破壊されたとき、戦場のガーディアンすべてを寝かせる。","legacyText":"魔力化","imageUrl":"https://one-draw.jp/ijinden/cardlist/001/card/01_032.png","expansion":15,"rarity":1,"type":1,"level":6,"color":2,"term":0,"trait":0,"legacy":1,"orderTable":71,"orderDeck":188},</text:p>
          </table:table-cell>
          <table:table-cell table:number-columns-repeated="16347"/>
        </table:table-row>
        <table:table-row table:style-name="ro2">
          <table:table-cell office:value-type="float" office:value="72" calcext:value-type="float">
            <text:p>72</text:p>
          </table:table-cell>
          <table:table-cell office:value-type="float" office:value="13" calcext:value-type="float">
            <text:p>13</text:p>
          </table:table-cell>
          <table:table-cell office:value-type="string" calcext:value-type="string">
            <text:p>1-33</text:p>
          </table:table-cell>
          <table:table-cell office:value-type="float" office:value="33" calcext:value-type="float">
            <text:p>33</text:p>
          </table:table-cell>
          <table:table-cell office:value-type="string" calcext:value-type="string">
            <text:p>千利休</text:p>
          </table:table-cell>
          <table:table-cell office:value-type="string" calcext:value-type="string">
            <text:p>せんのりきゅう</text:p>
          </table:table-cell>
          <table:table-cell office:value-type="string" calcext:value-type="string">
            <text:p>第１弾ブースターパック</text:p>
          </table:table-cell>
          <table:table-cell table:formula="of:=VLOOKUP([.G73];[$収録番号.$A$1:$収録番号.$B$9];2;0)" office:value-type="float" office:value="15" calcext:value-type="float">
            <text:p>15</text:p>
          </table:table-cell>
          <table:table-cell office:value-type="string" calcext:value-type="string">
            <text:p>R</text:p>
          </table:table-cell>
          <table:table-cell table:formula="of:=VLOOKUP([.I73];[$レアリティ番号.$A$1:$レアリティ番号.$B$4];2;0)" office:value-type="float" office:value="2" calcext:value-type="float">
            <text:p>2</text:p>
          </table:table-cell>
          <table:table-cell office:value-type="string" calcext:value-type="string">
            <text:p>イジン</text:p>
          </table:table-cell>
          <table:table-cell table:formula="of:=VLOOKUP([.K73];[$種類番号.$A$1:$種類番号.$B$4];2;0)" office:value-type="float" office:value="1" calcext:value-type="float">
            <text:p>1</text:p>
          </table:table-cell>
          <table:table-cell office:value-type="string" calcext:value-type="string">
            <text:p>緑</text:p>
          </table:table-cell>
          <table:table-cell table:formula="of:=VLOOKUP([.M73];[$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73];[$特性番号.$A$1:$特性番号.$B$8];2;0);0)" office:value-type="float" office:value="0" calcext:value-type="float">
            <text:p>0</text:p>
          </table:table-cell>
          <table:table-cell office:value-type="string" calcext:value-type="string">
            <text:p>戦場に置かれたとき、戦場に赤のイジンがいるなら発動する。イジン召喚権+1する。¶自分はマホウ使用に際し、自分の手札をすきなだけ墓地に置いてもよい。墓地に置いた1枚につき、手札のマホウの魔力コストは1減る。</text:p>
          </table:table-cell>
          <table:table-cell table:style-name="ce8" office:value-type="string" calcext:value-type="string">
            <text:p>1ドローする</text:p>
          </table:table-cell>
          <table:table-cell table:formula="of:=IFERROR(VLOOKUP([.$V73];[$遺業能力番号.$A$1:$遺業能力番号.$B$9];2;0);0)" office:value-type="float" office:value="4" calcext:value-type="float">
            <text:p>4</text:p>
          </table:table-cell>
          <table:table-cell office:value-type="string" calcext:value-type="string">
            <text:p>https://one-draw.jp/ijinden/cardlist/001/card/01_033.png</text:p>
          </table:table-cell>
          <table:table-cell table:formula="of:=CONCATENATE([$JSON.$A$1];[.$C73];[$JSON.$B$1];[.$E73];[$JSON.$C$1];[.$F73];[$JSON.$D$1];IF(ISNA([.$S73]);&quot;null&quot;;&quot;&quot;&quot;&quot;&amp;[.$S73]&amp;&quot;&quot;&quot;&quot;);[$JSON.$E$1];[.$U73];[$JSON.$F$1];IF(ISNA([.$V73]);&quot;null&quot;;&quot;&quot;&quot;&quot;&amp;[.$V73]&amp;&quot;&quot;&quot;&quot;);[$JSON.$G$1];[.$X73];[$JSON.$H$1];[.$H73];[$JSON.$I$1];[.J73];[$JSON.$J$1];[.$L73];[$JSON.$K$1];[.$O73];[$JSON.$L$1];[.$N73];[$JSON.$M$1];[.$R73];[$JSON.$N$1];[.$T73];[$JSON.$O$1];[.$W73];[$JSON.$P$1];[.$A73];[$JSON.$Q$1];[.$B73];[$JSON.$R$1])" office:value-type="string" office:string-value="{&quot;id&quot;:&quot;1-33&quot;,&quot;name&quot;:&quot;千利休&quot;,&quot;kana&quot;:&quot;せんのりきゅう&quot;,&quot;traitText&quot;:null,&quot;ruleText&quot;:&quot;戦場に置かれたとき、戦場に赤のイジンがいるなら発動する。イジン召喚権+1する。¶自分はマホウ使用に際し、自分の手札をすきなだけ墓地に置いてもよい。墓地に置いた1枚につき、手札のマホウの魔力コストは1減る。&quot;,&quot;legacyText&quot;:&quot;1ドローする&quot;,&quot;imageUrl&quot;:&quot;https://one-draw.jp/ijinden/cardlist/001/card/01_033.png&quot;,&quot;expansion&quot;:15,&quot;rarity&quot;:2,&quot;type&quot;:1,&quot;level&quot;:1,&quot;color&quot;:4,&quot;term&quot;:0,&quot;trait&quot;:0,&quot;legacy&quot;:4,&quot;orderTable&quot;:72,&quot;orderDeck&quot;:13}," calcext:value-type="string">
            <text:p>{"id":"1-33","name":"千利休","kana":"せんのりきゅう","traitText":null,"ruleText":"戦場に置かれたとき、戦場に赤のイジンがいるなら発動する。イジン召喚権+1する。¶自分はマホウ使用に際し、自分の手札をすきなだけ墓地に置いてもよい。墓地に置いた1枚につき、手札のマホウの魔力コストは1減る。","legacyText":"1ドローする","imageUrl":"https://one-draw.jp/ijinden/cardlist/001/card/01_033.png","expansion":15,"rarity":2,"type":1,"level":1,"color":4,"term":0,"trait":0,"legacy":4,"orderTable":72,"orderDeck":13},</text:p>
          </table:table-cell>
          <table:table-cell table:number-columns-repeated="16347"/>
        </table:table-row>
        <table:table-row table:style-name="ro2">
          <table:table-cell office:value-type="float" office:value="73" calcext:value-type="float">
            <text:p>73</text:p>
          </table:table-cell>
          <table:table-cell office:value-type="float" office:value="45" calcext:value-type="float">
            <text:p>45</text:p>
          </table:table-cell>
          <table:table-cell office:value-type="string" calcext:value-type="string">
            <text:p>1-34</text:p>
          </table:table-cell>
          <table:table-cell office:value-type="float" office:value="34" calcext:value-type="float">
            <text:p>34</text:p>
          </table:table-cell>
          <table:table-cell office:value-type="string" calcext:value-type="string">
            <text:p>狩野永徳</text:p>
          </table:table-cell>
          <table:table-cell office:value-type="string" calcext:value-type="string">
            <text:p>かのうえいとく</text:p>
          </table:table-cell>
          <table:table-cell office:value-type="string" calcext:value-type="string">
            <text:p>第１弾ブースターパック</text:p>
          </table:table-cell>
          <table:table-cell table:formula="of:=VLOOKUP([.G74];[$収録番号.$A$1:$収録番号.$B$9];2;0)" office:value-type="float" office:value="15" calcext:value-type="float">
            <text:p>15</text:p>
          </table:table-cell>
          <table:table-cell office:value-type="string" calcext:value-type="string">
            <text:p>N</text:p>
          </table:table-cell>
          <table:table-cell table:formula="of:=VLOOKUP([.I74];[$レアリティ番号.$A$1:$レアリティ番号.$B$4];2;0)" office:value-type="float" office:value="1" calcext:value-type="float">
            <text:p>1</text:p>
          </table:table-cell>
          <table:table-cell office:value-type="string" calcext:value-type="string">
            <text:p>イジン</text:p>
          </table:table-cell>
          <table:table-cell table:formula="of:=VLOOKUP([.K74];[$種類番号.$A$1:$種類番号.$B$4];2;0)" office:value-type="float" office:value="1" calcext:value-type="float">
            <text:p>1</text:p>
          </table:table-cell>
          <table:table-cell office:value-type="string" calcext:value-type="string">
            <text:p>緑</text:p>
          </table:table-cell>
          <table:table-cell table:formula="of:=VLOOKUP([.M74];[$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4];[$能力語番号.$A$1:$能力語番号.$B$10];2;0);0)" office:value-type="float" office:value="0" calcext:value-type="float">
            <text:p>0</text:p>
          </table:table-cell>
          <table:table-cell office:value-type="string" calcext:value-type="string">
            <text:p>美術</text:p>
          </table:table-cell>
          <table:table-cell table:formula="of:=IFERROR(VLOOKUP([.$S74];[$特性番号.$A$1:$特性番号.$B$8];2;0);0)" office:value-type="float" office:value="2" calcext:value-type="float">
            <text:p>2</text:p>
          </table:table-cell>
          <table:table-cell office:value-type="string" calcext:value-type="string">
            <text:p>戦場に置かれたとき、戦場に「剣術」イジンがいるなら発動する。1ドローする。</text:p>
          </table:table-cell>
          <table:table-cell table:style-name="ce8" office:value-type="string" calcext:value-type="string">
            <text:p>1ドローする</text:p>
          </table:table-cell>
          <table:table-cell table:formula="of:=IFERROR(VLOOKUP([.$V74];[$遺業能力番号.$A$1:$遺業能力番号.$B$9];2;0);0)" office:value-type="float" office:value="4" calcext:value-type="float">
            <text:p>4</text:p>
          </table:table-cell>
          <table:table-cell office:value-type="string" calcext:value-type="string">
            <text:p>https://one-draw.jp/ijinden/cardlist/001/card/01_034.png</text:p>
          </table:table-cell>
          <table:table-cell table:formula="of:=CONCATENATE([$JSON.$A$1];[.$C74];[$JSON.$B$1];[.$E74];[$JSON.$C$1];[.$F74];[$JSON.$D$1];IF(ISNA([.$S74]);&quot;null&quot;;&quot;&quot;&quot;&quot;&amp;[.$S74]&amp;&quot;&quot;&quot;&quot;);[$JSON.$E$1];[.$U74];[$JSON.$F$1];IF(ISNA([.$V74]);&quot;null&quot;;&quot;&quot;&quot;&quot;&amp;[.$V74]&amp;&quot;&quot;&quot;&quot;);[$JSON.$G$1];[.$X74];[$JSON.$H$1];[.$H74];[$JSON.$I$1];[.J74];[$JSON.$J$1];[.$L74];[$JSON.$K$1];[.$O74];[$JSON.$L$1];[.$N74];[$JSON.$M$1];[.$R74];[$JSON.$N$1];[.$T74];[$JSON.$O$1];[.$W74];[$JSON.$P$1];[.$A74];[$JSON.$Q$1];[.$B74];[$JSON.$R$1])" office:value-type="string" office:string-value="{&quot;id&quot;:&quot;1-34&quot;,&quot;name&quot;:&quot;狩野永徳&quot;,&quot;kana&quot;:&quot;かのうえいとく&quot;,&quot;traitText&quot;:&quot;美術&quot;,&quot;ruleText&quot;:&quot;戦場に置かれたとき、戦場に「剣術」イジンがいるなら発動する。1ドローする。&quot;,&quot;legacyText&quot;:&quot;1ドローする&quot;,&quot;imageUrl&quot;:&quot;https://one-draw.jp/ijinden/cardlist/001/card/01_034.png&quot;,&quot;expansion&quot;:15,&quot;rarity&quot;:1,&quot;type&quot;:1,&quot;level&quot;:2,&quot;color&quot;:4,&quot;term&quot;:0,&quot;trait&quot;:2,&quot;legacy&quot;:4,&quot;orderTable&quot;:73,&quot;orderDeck&quot;:45}," calcext:value-type="string">
            <text:p>{"id":"1-34","name":"狩野永徳","kana":"かのうえいとく","traitText":"美術","ruleText":"戦場に置かれたとき、戦場に「剣術」イジンがいるなら発動する。1ドローする。","legacyText":"1ドローする","imageUrl":"https://one-draw.jp/ijinden/cardlist/001/card/01_034.png","expansion":15,"rarity":1,"type":1,"level":2,"color":4,"term":0,"trait":2,"legacy":4,"orderTable":73,"orderDeck":45},</text:p>
          </table:table-cell>
          <table:table-cell table:number-columns-repeated="16347"/>
        </table:table-row>
        <table:table-row table:style-name="ro2">
          <table:table-cell office:value-type="float" office:value="74" calcext:value-type="float">
            <text:p>74</text:p>
          </table:table-cell>
          <table:table-cell office:value-type="float" office:value="86" calcext:value-type="float">
            <text:p>86</text:p>
          </table:table-cell>
          <table:table-cell office:value-type="string" calcext:value-type="string">
            <text:p>1-35</text:p>
          </table:table-cell>
          <table:table-cell office:value-type="float" office:value="35" calcext:value-type="float">
            <text:p>35</text:p>
          </table:table-cell>
          <table:table-cell office:value-type="string" calcext:value-type="string">
            <text:p>安倍晴明</text:p>
          </table:table-cell>
          <table:table-cell office:value-type="string" calcext:value-type="string">
            <text:p>あべのせいめい</text:p>
          </table:table-cell>
          <table:table-cell office:value-type="string" calcext:value-type="string">
            <text:p>第１弾ブースターパック</text:p>
          </table:table-cell>
          <table:table-cell table:formula="of:=VLOOKUP([.G75];[$収録番号.$A$1:$収録番号.$B$9];2;0)" office:value-type="float" office:value="15" calcext:value-type="float">
            <text:p>15</text:p>
          </table:table-cell>
          <table:table-cell office:value-type="string" calcext:value-type="string">
            <text:p>N</text:p>
          </table:table-cell>
          <table:table-cell table:formula="of:=VLOOKUP([.I75];[$レアリティ番号.$A$1:$レアリティ番号.$B$4];2;0)" office:value-type="float" office:value="1" calcext:value-type="float">
            <text:p>1</text:p>
          </table:table-cell>
          <table:table-cell office:value-type="string" calcext:value-type="string">
            <text:p>イジン</text:p>
          </table:table-cell>
          <table:table-cell table:formula="of:=VLOOKUP([.K75];[$種類番号.$A$1:$種類番号.$B$4];2;0)" office:value-type="float" office:value="1" calcext:value-type="float">
            <text:p>1</text:p>
          </table:table-cell>
          <table:table-cell office:value-type="string" calcext:value-type="string">
            <text:p>緑</text:p>
          </table:table-cell>
          <table:table-cell table:formula="of:=VLOOKUP([.M75];[$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75];[$特性番号.$A$1:$特性番号.$B$8];2;0);0)" office:value-type="float" office:value="0" calcext:value-type="float">
            <text:p>0</text:p>
          </table:table-cell>
          <table:table-cell office:value-type="string" calcext:value-type="string">
            <text:p>自分の戦場のガーディアン1体につき「パワー+500」を得る。¶破壊されたとき、自分の戦場のガーディアン1体を墓地に置いて発動できる。これを破壊されていない状態にする。</text:p>
          </table:table-cell>
          <table:table-cell table:style-name="ce8" office:value-type="string" calcext:value-type="string">
            <text:p>魔力化</text:p>
          </table:table-cell>
          <table:table-cell table:formula="of:=IFERROR(VLOOKUP([.$V75];[$遺業能力番号.$A$1:$遺業能力番号.$B$9];2;0);0)" office:value-type="float" office:value="1" calcext:value-type="float">
            <text:p>1</text:p>
          </table:table-cell>
          <table:table-cell office:value-type="string" calcext:value-type="string">
            <text:p>https://one-draw.jp/ijinden/cardlist/001/card/01_035.png</text:p>
          </table:table-cell>
          <table:table-cell table:formula="of:=CONCATENATE([$JSON.$A$1];[.$C75];[$JSON.$B$1];[.$E75];[$JSON.$C$1];[.$F75];[$JSON.$D$1];IF(ISNA([.$S75]);&quot;null&quot;;&quot;&quot;&quot;&quot;&amp;[.$S75]&amp;&quot;&quot;&quot;&quot;);[$JSON.$E$1];[.$U75];[$JSON.$F$1];IF(ISNA([.$V75]);&quot;null&quot;;&quot;&quot;&quot;&quot;&amp;[.$V75]&amp;&quot;&quot;&quot;&quot;);[$JSON.$G$1];[.$X75];[$JSON.$H$1];[.$H75];[$JSON.$I$1];[.J75];[$JSON.$J$1];[.$L75];[$JSON.$K$1];[.$O75];[$JSON.$L$1];[.$N75];[$JSON.$M$1];[.$R75];[$JSON.$N$1];[.$T75];[$JSON.$O$1];[.$W75];[$JSON.$P$1];[.$A75];[$JSON.$Q$1];[.$B75];[$JSON.$R$1])" office:value-type="string" office:string-value="{&quot;id&quot;:&quot;1-35&quot;,&quot;name&quot;:&quot;安倍晴明&quot;,&quot;kana&quot;:&quot;あべのせいめい&quot;,&quot;traitText&quot;:null,&quot;ruleText&quot;:&quot;自分の戦場のガーディアン1体につき「パワー+500」を得る。¶破壊されたとき、自分の戦場のガーディアン1体を墓地に置いて発動できる。これを破壊されていない状態にする。&quot;,&quot;legacyText&quot;:&quot;魔力化&quot;,&quot;imageUrl&quot;:&quot;https://one-draw.jp/ijinden/cardlist/001/card/01_035.png&quot;,&quot;expansion&quot;:15,&quot;rarity&quot;:1,&quot;type&quot;:1,&quot;level&quot;:3,&quot;color&quot;:4,&quot;term&quot;:0,&quot;trait&quot;:0,&quot;legacy&quot;:1,&quot;orderTable&quot;:74,&quot;orderDeck&quot;:86}," calcext:value-type="string">
            <text:p>{"id":"1-35","name":"安倍晴明","kana":"あべのせいめい","traitText":null,"ruleText":"自分の戦場のガーディアン1体につき「パワー+500」を得る。¶破壊されたとき、自分の戦場のガーディアン1体を墓地に置いて発動できる。これを破壊されていない状態にする。","legacyText":"魔力化","imageUrl":"https://one-draw.jp/ijinden/cardlist/001/card/01_035.png","expansion":15,"rarity":1,"type":1,"level":3,"color":4,"term":0,"trait":0,"legacy":1,"orderTable":74,"orderDeck":86},</text:p>
          </table:table-cell>
          <table:table-cell table:number-columns-repeated="16347"/>
        </table:table-row>
        <table:table-row table:style-name="ro2">
          <table:table-cell office:value-type="float" office:value="75" calcext:value-type="float">
            <text:p>75</text:p>
          </table:table-cell>
          <table:table-cell office:value-type="float" office:value="87" calcext:value-type="float">
            <text:p>87</text:p>
          </table:table-cell>
          <table:table-cell office:value-type="string" calcext:value-type="string">
            <text:p>1-36</text:p>
          </table:table-cell>
          <table:table-cell office:value-type="float" office:value="36" calcext:value-type="float">
            <text:p>36</text:p>
          </table:table-cell>
          <table:table-cell office:value-type="string" calcext:value-type="string">
            <text:p>吉田兼好</text:p>
          </table:table-cell>
          <table:table-cell office:value-type="string" calcext:value-type="string">
            <text:p>よしだけんこう</text:p>
          </table:table-cell>
          <table:table-cell office:value-type="string" calcext:value-type="string">
            <text:p>第１弾ブースターパック</text:p>
          </table:table-cell>
          <table:table-cell table:formula="of:=VLOOKUP([.G76];[$収録番号.$A$1:$収録番号.$B$9];2;0)" office:value-type="float" office:value="15" calcext:value-type="float">
            <text:p>15</text:p>
          </table:table-cell>
          <table:table-cell office:value-type="string" calcext:value-type="string">
            <text:p>N</text:p>
          </table:table-cell>
          <table:table-cell table:formula="of:=VLOOKUP([.I76];[$レアリティ番号.$A$1:$レアリティ番号.$B$4];2;0)" office:value-type="float" office:value="1" calcext:value-type="float">
            <text:p>1</text:p>
          </table:table-cell>
          <table:table-cell office:value-type="string" calcext:value-type="string">
            <text:p>イジン</text:p>
          </table:table-cell>
          <table:table-cell table:formula="of:=VLOOKUP([.K76];[$種類番号.$A$1:$種類番号.$B$4];2;0)" office:value-type="float" office:value="1" calcext:value-type="float">
            <text:p>1</text:p>
          </table:table-cell>
          <table:table-cell office:value-type="string" calcext:value-type="string">
            <text:p>緑</text:p>
          </table:table-cell>
          <table:table-cell table:formula="of:=VLOOKUP([.M76];[$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Q7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76];[$特性番号.$A$1:$特性番号.$B$8];2;0);0)" office:value-type="float" office:value="0" calcext:value-type="float">
            <text:p>0</text:p>
          </table:table-cell>
          <table:table-cell office:value-type="string" calcext:value-type="string">
            <text:p>執筆 - ハイケイが戦場に置かれたとき、そのハイケイがこのターンで2つ目に置かれたハイケイなら発動できる。そのハイケイ1つを裏にして魔力ゾーンに置く。</text:p>
          </table:table-cell>
          <table:table-cell table:style-name="ce8" office:value-type="string" calcext:value-type="string">
            <text:p>1ドローする</text:p>
          </table:table-cell>
          <table:table-cell table:formula="of:=IFERROR(VLOOKUP([.$V76];[$遺業能力番号.$A$1:$遺業能力番号.$B$9];2;0);0)" office:value-type="float" office:value="4" calcext:value-type="float">
            <text:p>4</text:p>
          </table:table-cell>
          <table:table-cell office:value-type="string" calcext:value-type="string">
            <text:p>https://one-draw.jp/ijinden/cardlist/001/card/01_036.png</text:p>
          </table:table-cell>
          <table:table-cell table:formula="of:=CONCATENATE([$JSON.$A$1];[.$C76];[$JSON.$B$1];[.$E76];[$JSON.$C$1];[.$F76];[$JSON.$D$1];IF(ISNA([.$S76]);&quot;null&quot;;&quot;&quot;&quot;&quot;&amp;[.$S76]&amp;&quot;&quot;&quot;&quot;);[$JSON.$E$1];[.$U76];[$JSON.$F$1];IF(ISNA([.$V76]);&quot;null&quot;;&quot;&quot;&quot;&quot;&amp;[.$V76]&amp;&quot;&quot;&quot;&quot;);[$JSON.$G$1];[.$X76];[$JSON.$H$1];[.$H76];[$JSON.$I$1];[.J76];[$JSON.$J$1];[.$L76];[$JSON.$K$1];[.$O76];[$JSON.$L$1];[.$N76];[$JSON.$M$1];[.$R76];[$JSON.$N$1];[.$T76];[$JSON.$O$1];[.$W76];[$JSON.$P$1];[.$A76];[$JSON.$Q$1];[.$B76];[$JSON.$R$1])" office:value-type="string" office:string-value="{&quot;id&quot;:&quot;1-36&quot;,&quot;name&quot;:&quot;吉田兼好&quot;,&quot;kana&quot;:&quot;よしだけんこう&quot;,&quot;traitText&quot;:null,&quot;ruleText&quot;:&quot;執筆 - ハイケイが戦場に置かれたとき、そのハイケイがこのターンで2つ目に置かれたハイケイなら発動できる。そのハイケイ1つを裏にして魔力ゾーンに置く。&quot;,&quot;legacyText&quot;:&quot;1ドローする&quot;,&quot;imageUrl&quot;:&quot;https://one-draw.jp/ijinden/cardlist/001/card/01_036.png&quot;,&quot;expansion&quot;:15,&quot;rarity&quot;:1,&quot;type&quot;:1,&quot;level&quot;:3,&quot;color&quot;:4,&quot;term&quot;:2,&quot;trait&quot;:0,&quot;legacy&quot;:4,&quot;orderTable&quot;:75,&quot;orderDeck&quot;:87}," calcext:value-type="string">
            <text:p>{"id":"1-36","name":"吉田兼好","kana":"よしだけんこう","traitText":null,"ruleText":"執筆 - ハイケイが戦場に置かれたとき、そのハイケイがこのターンで2つ目に置かれたハイケイなら発動できる。そのハイケイ1つを裏にして魔力ゾーンに置く。","legacyText":"1ドローする","imageUrl":"https://one-draw.jp/ijinden/cardlist/001/card/01_036.png","expansion":15,"rarity":1,"type":1,"level":3,"color":4,"term":2,"trait":0,"legacy":4,"orderTable":75,"orderDeck":87},</text:p>
          </table:table-cell>
          <table:table-cell table:number-columns-repeated="16347"/>
        </table:table-row>
        <table:table-row table:style-name="ro2">
          <table:table-cell office:value-type="float" office:value="76" calcext:value-type="float">
            <text:p>76</text:p>
          </table:table-cell>
          <table:table-cell office:value-type="float" office:value="125" calcext:value-type="float">
            <text:p>125</text:p>
          </table:table-cell>
          <table:table-cell office:value-type="string" calcext:value-type="string">
            <text:p>1-37</text:p>
          </table:table-cell>
          <table:table-cell office:value-type="float" office:value="37" calcext:value-type="float">
            <text:p>37</text:p>
          </table:table-cell>
          <table:table-cell office:value-type="string" calcext:value-type="string">
            <text:p>蘆屋道満</text:p>
          </table:table-cell>
          <table:table-cell office:value-type="string" calcext:value-type="string">
            <text:p>あしやどうまん</text:p>
          </table:table-cell>
          <table:table-cell office:value-type="string" calcext:value-type="string">
            <text:p>第１弾ブースターパック</text:p>
          </table:table-cell>
          <table:table-cell table:formula="of:=VLOOKUP([.G77];[$収録番号.$A$1:$収録番号.$B$9];2;0)" office:value-type="float" office:value="15" calcext:value-type="float">
            <text:p>15</text:p>
          </table:table-cell>
          <table:table-cell office:value-type="string" calcext:value-type="string">
            <text:p>N</text:p>
          </table:table-cell>
          <table:table-cell table:formula="of:=VLOOKUP([.I77];[$レアリティ番号.$A$1:$レアリティ番号.$B$4];2;0)" office:value-type="float" office:value="1" calcext:value-type="float">
            <text:p>1</text:p>
          </table:table-cell>
          <table:table-cell office:value-type="string" calcext:value-type="string">
            <text:p>イジン</text:p>
          </table:table-cell>
          <table:table-cell table:formula="of:=VLOOKUP([.K77];[$種類番号.$A$1:$種類番号.$B$4];2;0)" office:value-type="float" office:value="1" calcext:value-type="float">
            <text:p>1</text:p>
          </table:table-cell>
          <table:table-cell office:value-type="string" calcext:value-type="string">
            <text:p>緑</text:p>
          </table:table-cell>
          <table:table-cell table:formula="of:=VLOOKUP([.M77];[$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77];[$特性番号.$A$1:$特性番号.$B$8];2;0);0)" office:value-type="float" office:value="0" calcext:value-type="float">
            <text:p>0</text:p>
          </table:table-cell>
          <table:table-cell office:value-type="string" calcext:value-type="string">
            <text:p>ガーディアンが戦場に置かれる際、寝ている状態で戦場に置かれる。</text:p>
          </table:table-cell>
          <table:table-cell table:style-name="ce8" office:value-type="string" calcext:value-type="string">
            <text:p>魔力化</text:p>
          </table:table-cell>
          <table:table-cell table:formula="of:=IFERROR(VLOOKUP([.$V77];[$遺業能力番号.$A$1:$遺業能力番号.$B$9];2;0);0)" office:value-type="float" office:value="1" calcext:value-type="float">
            <text:p>1</text:p>
          </table:table-cell>
          <table:table-cell office:value-type="string" calcext:value-type="string">
            <text:p>https://one-draw.jp/ijinden/cardlist/001/card/01_037.png</text:p>
          </table:table-cell>
          <table:table-cell table:formula="of:=CONCATENATE([$JSON.$A$1];[.$C77];[$JSON.$B$1];[.$E77];[$JSON.$C$1];[.$F77];[$JSON.$D$1];IF(ISNA([.$S77]);&quot;null&quot;;&quot;&quot;&quot;&quot;&amp;[.$S77]&amp;&quot;&quot;&quot;&quot;);[$JSON.$E$1];[.$U77];[$JSON.$F$1];IF(ISNA([.$V77]);&quot;null&quot;;&quot;&quot;&quot;&quot;&amp;[.$V77]&amp;&quot;&quot;&quot;&quot;);[$JSON.$G$1];[.$X77];[$JSON.$H$1];[.$H77];[$JSON.$I$1];[.J77];[$JSON.$J$1];[.$L77];[$JSON.$K$1];[.$O77];[$JSON.$L$1];[.$N77];[$JSON.$M$1];[.$R77];[$JSON.$N$1];[.$T77];[$JSON.$O$1];[.$W77];[$JSON.$P$1];[.$A77];[$JSON.$Q$1];[.$B77];[$JSON.$R$1])" office:value-type="string" office:string-value="{&quot;id&quot;:&quot;1-37&quot;,&quot;name&quot;:&quot;蘆屋道満&quot;,&quot;kana&quot;:&quot;あしやどうまん&quot;,&quot;traitText&quot;:null,&quot;ruleText&quot;:&quot;ガーディアンが戦場に置かれる際、寝ている状態で戦場に置かれる。&quot;,&quot;legacyText&quot;:&quot;魔力化&quot;,&quot;imageUrl&quot;:&quot;https://one-draw.jp/ijinden/cardlist/001/card/01_037.png&quot;,&quot;expansion&quot;:15,&quot;rarity&quot;:1,&quot;type&quot;:1,&quot;level&quot;:4,&quot;color&quot;:4,&quot;term&quot;:0,&quot;trait&quot;:0,&quot;legacy&quot;:1,&quot;orderTable&quot;:76,&quot;orderDeck&quot;:125}," calcext:value-type="string">
            <text:p>{"id":"1-37","name":"蘆屋道満","kana":"あしやどうまん","traitText":null,"ruleText":"ガーディアンが戦場に置かれる際、寝ている状態で戦場に置かれる。","legacyText":"魔力化","imageUrl":"https://one-draw.jp/ijinden/cardlist/001/card/01_037.png","expansion":15,"rarity":1,"type":1,"level":4,"color":4,"term":0,"trait":0,"legacy":1,"orderTable":76,"orderDeck":125},</text:p>
          </table:table-cell>
          <table:table-cell table:number-columns-repeated="16347"/>
        </table:table-row>
        <table:table-row table:style-name="ro2">
          <table:table-cell office:value-type="float" office:value="77" calcext:value-type="float">
            <text:p>77</text:p>
          </table:table-cell>
          <table:table-cell office:value-type="float" office:value="126" calcext:value-type="float">
            <text:p>126</text:p>
          </table:table-cell>
          <table:table-cell office:value-type="string" calcext:value-type="string">
            <text:p>1-38</text:p>
          </table:table-cell>
          <table:table-cell office:value-type="float" office:value="38" calcext:value-type="float">
            <text:p>38</text:p>
          </table:table-cell>
          <table:table-cell office:value-type="string" calcext:value-type="string">
            <text:p>鴨長明</text:p>
          </table:table-cell>
          <table:table-cell office:value-type="string" calcext:value-type="string">
            <text:p>かものちょうめい</text:p>
          </table:table-cell>
          <table:table-cell office:value-type="string" calcext:value-type="string">
            <text:p>第１弾ブースターパック</text:p>
          </table:table-cell>
          <table:table-cell table:formula="of:=VLOOKUP([.G78];[$収録番号.$A$1:$収録番号.$B$9];2;0)" office:value-type="float" office:value="15" calcext:value-type="float">
            <text:p>15</text:p>
          </table:table-cell>
          <table:table-cell office:value-type="string" calcext:value-type="string">
            <text:p>N</text:p>
          </table:table-cell>
          <table:table-cell table:formula="of:=VLOOKUP([.I78];[$レアリティ番号.$A$1:$レアリティ番号.$B$4];2;0)" office:value-type="float" office:value="1" calcext:value-type="float">
            <text:p>1</text:p>
          </table:table-cell>
          <table:table-cell office:value-type="string" calcext:value-type="string">
            <text:p>イジン</text:p>
          </table:table-cell>
          <table:table-cell table:formula="of:=VLOOKUP([.K78];[$種類番号.$A$1:$種類番号.$B$4];2;0)" office:value-type="float" office:value="1" calcext:value-type="float">
            <text:p>1</text:p>
          </table:table-cell>
          <table:table-cell office:value-type="string" calcext:value-type="string">
            <text:p>緑</text:p>
          </table:table-cell>
          <table:table-cell table:formula="of:=VLOOKUP([.M78];[$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執筆</text:p>
          </table:table-cell>
          <table:table-cell table:formula="of:=IFERROR(VLOOKUP([.$Q78];[$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78];[$特性番号.$A$1:$特性番号.$B$8];2;0);0)" office:value-type="float" office:value="0" calcext:value-type="float">
            <text:p>0</text:p>
          </table:table-cell>
          <table:table-cell office:value-type="string" calcext:value-type="string">
            <text:p>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text:p>
          </table:table-cell>
          <table:table-cell table:style-name="ce8" table:formula="of:=NA()" office:value-type="string" office:string-value="" calcext:value-type="error">
            <text:p>#N/A</text:p>
          </table:table-cell>
          <table:table-cell table:formula="of:=IFERROR(VLOOKUP([.$V78];[$遺業能力番号.$A$1:$遺業能力番号.$B$9];2;0);0)" office:value-type="float" office:value="0" calcext:value-type="float">
            <text:p>0</text:p>
          </table:table-cell>
          <table:table-cell office:value-type="string" calcext:value-type="string">
            <text:p>https://one-draw.jp/ijinden/cardlist/001/card/01_038.png</text:p>
          </table:table-cell>
          <table:table-cell table:formula="of:=CONCATENATE([$JSON.$A$1];[.$C78];[$JSON.$B$1];[.$E78];[$JSON.$C$1];[.$F78];[$JSON.$D$1];IF(ISNA([.$S78]);&quot;null&quot;;&quot;&quot;&quot;&quot;&amp;[.$S78]&amp;&quot;&quot;&quot;&quot;);[$JSON.$E$1];[.$U78];[$JSON.$F$1];IF(ISNA([.$V78]);&quot;null&quot;;&quot;&quot;&quot;&quot;&amp;[.$V78]&amp;&quot;&quot;&quot;&quot;);[$JSON.$G$1];[.$X78];[$JSON.$H$1];[.$H78];[$JSON.$I$1];[.J78];[$JSON.$J$1];[.$L78];[$JSON.$K$1];[.$O78];[$JSON.$L$1];[.$N78];[$JSON.$M$1];[.$R78];[$JSON.$N$1];[.$T78];[$JSON.$O$1];[.$W78];[$JSON.$P$1];[.$A78];[$JSON.$Q$1];[.$B78];[$JSON.$R$1])" office:value-type="string" office:string-value="{&quot;id&quot;:&quot;1-38&quot;,&quot;name&quot;:&quot;鴨長明&quot;,&quot;kana&quot;:&quot;かものちょうめい&quot;,&quot;traitText&quot;:null,&quot;ruleText&quot;:&quot;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quot;,&quot;legacyText&quot;:null,&quot;imageUrl&quot;:&quot;https://one-draw.jp/ijinden/cardlist/001/card/01_038.png&quot;,&quot;expansion&quot;:15,&quot;rarity&quot;:1,&quot;type&quot;:1,&quot;level&quot;:4,&quot;color&quot;:4,&quot;term&quot;:2,&quot;trait&quot;:0,&quot;legacy&quot;:0,&quot;orderTable&quot;:77,&quot;orderDeck&quot;:126}," calcext:value-type="string">
            <text:p>{"id":"1-38","name":"鴨長明","kana":"かものちょうめい","traitText":null,"ruleText":"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legacyText":null,"imageUrl":"https://one-draw.jp/ijinden/cardlist/001/card/01_038.png","expansion":15,"rarity":1,"type":1,"level":4,"color":4,"term":2,"trait":0,"legacy":0,"orderTable":77,"orderDeck":126},</text:p>
          </table:table-cell>
          <table:table-cell table:number-columns-repeated="16347"/>
        </table:table-row>
        <table:table-row table:style-name="ro2">
          <table:table-cell office:value-type="float" office:value="78" calcext:value-type="float">
            <text:p>78</text:p>
          </table:table-cell>
          <table:table-cell office:value-type="float" office:value="127" calcext:value-type="float">
            <text:p>127</text:p>
          </table:table-cell>
          <table:table-cell office:value-type="string" calcext:value-type="string">
            <text:p>1-39</text:p>
          </table:table-cell>
          <table:table-cell office:value-type="float" office:value="39" calcext:value-type="float">
            <text:p>39</text:p>
          </table:table-cell>
          <table:table-cell office:value-type="string" calcext:value-type="string">
            <text:p>ヨハン・ゼバスティアン・バッハ</text:p>
          </table:table-cell>
          <table:table-cell office:value-type="string" calcext:value-type="string">
            <text:p>よはんぜばすてぃあんばっは</text:p>
          </table:table-cell>
          <table:table-cell office:value-type="string" calcext:value-type="string">
            <text:p>第１弾ブースターパック</text:p>
          </table:table-cell>
          <table:table-cell table:formula="of:=VLOOKUP([.G79];[$収録番号.$A$1:$収録番号.$B$9];2;0)" office:value-type="float" office:value="15" calcext:value-type="float">
            <text:p>15</text:p>
          </table:table-cell>
          <table:table-cell office:value-type="string" calcext:value-type="string">
            <text:p>N</text:p>
          </table:table-cell>
          <table:table-cell table:formula="of:=VLOOKUP([.I79];[$レアリティ番号.$A$1:$レアリティ番号.$B$4];2;0)" office:value-type="float" office:value="1" calcext:value-type="float">
            <text:p>1</text:p>
          </table:table-cell>
          <table:table-cell office:value-type="string" calcext:value-type="string">
            <text:p>イジン</text:p>
          </table:table-cell>
          <table:table-cell table:formula="of:=VLOOKUP([.K79];[$種類番号.$A$1:$種類番号.$B$4];2;0)" office:value-type="float" office:value="1" calcext:value-type="float">
            <text:p>1</text:p>
          </table:table-cell>
          <table:table-cell office:value-type="string" calcext:value-type="string">
            <text:p>緑</text:p>
          </table:table-cell>
          <table:table-cell table:formula="of:=VLOOKUP([.M79];[$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9];[$能力語番号.$A$1:$能力語番号.$B$10];2;0);0)" office:value-type="float" office:value="0" calcext:value-type="float">
            <text:p>0</text:p>
          </table:table-cell>
          <table:table-cell office:value-type="string" calcext:value-type="string">
            <text:p>音楽</text:p>
          </table:table-cell>
          <table:table-cell table:formula="of:=IFERROR(VLOOKUP([.$S79];[$特性番号.$A$1:$特性番号.$B$8];2;0);0)" office:value-type="float" office:value="4" calcext:value-type="float">
            <text:p>4</text:p>
          </table:table-cell>
          <table:table-cell office:value-type="string" calcext:value-type="string">
            <text:p>これが戦場にいる間、戦場のイジンとハイケイは「特性：音楽」を得る。</text:p>
          </table:table-cell>
          <table:table-cell table:style-name="ce8" table:formula="of:=NA()" office:value-type="string" office:string-value="" calcext:value-type="error">
            <text:p>#N/A</text:p>
          </table:table-cell>
          <table:table-cell table:formula="of:=IFERROR(VLOOKUP([.$V79];[$遺業能力番号.$A$1:$遺業能力番号.$B$9];2;0);0)" office:value-type="float" office:value="0" calcext:value-type="float">
            <text:p>0</text:p>
          </table:table-cell>
          <table:table-cell office:value-type="string" calcext:value-type="string">
            <text:p>https://one-draw.jp/ijinden/cardlist/001/card/01_039.png</text:p>
          </table:table-cell>
          <table:table-cell table:formula="of:=CONCATENATE([$JSON.$A$1];[.$C79];[$JSON.$B$1];[.$E79];[$JSON.$C$1];[.$F79];[$JSON.$D$1];IF(ISNA([.$S79]);&quot;null&quot;;&quot;&quot;&quot;&quot;&amp;[.$S79]&amp;&quot;&quot;&quot;&quot;);[$JSON.$E$1];[.$U79];[$JSON.$F$1];IF(ISNA([.$V79]);&quot;null&quot;;&quot;&quot;&quot;&quot;&amp;[.$V79]&amp;&quot;&quot;&quot;&quot;);[$JSON.$G$1];[.$X79];[$JSON.$H$1];[.$H79];[$JSON.$I$1];[.J79];[$JSON.$J$1];[.$L79];[$JSON.$K$1];[.$O79];[$JSON.$L$1];[.$N79];[$JSON.$M$1];[.$R79];[$JSON.$N$1];[.$T79];[$JSON.$O$1];[.$W79];[$JSON.$P$1];[.$A79];[$JSON.$Q$1];[.$B79];[$JSON.$R$1])" office:value-type="string" office:string-value="{&quot;id&quot;:&quot;1-39&quot;,&quot;name&quot;:&quot;ヨハン・ゼバスティアン・バッハ&quot;,&quot;kana&quot;:&quot;よはんぜばすてぃあんばっは&quot;,&quot;traitText&quot;:&quot;音楽&quot;,&quot;ruleText&quot;:&quot;これが戦場にいる間、戦場のイジンとハイケイは「特性：音楽」を得る。&quot;,&quot;legacyText&quot;:null,&quot;imageUrl&quot;:&quot;https://one-draw.jp/ijinden/cardlist/001/card/01_039.png&quot;,&quot;expansion&quot;:15,&quot;rarity&quot;:1,&quot;type&quot;:1,&quot;level&quot;:4,&quot;color&quot;:4,&quot;term&quot;:0,&quot;trait&quot;:4,&quot;legacy&quot;:0,&quot;orderTable&quot;:78,&quot;orderDeck&quot;:127}," calcext:value-type="string">
            <text:p>{"id":"1-39","name":"ヨハン・ゼバスティアン・バッハ","kana":"よはんぜばすてぃあんばっは","traitText":"音楽","ruleText":"これが戦場にいる間、戦場のイジンとハイケイは「特性：音楽」を得る。","legacyText":null,"imageUrl":"https://one-draw.jp/ijinden/cardlist/001/card/01_039.png","expansion":15,"rarity":1,"type":1,"level":4,"color":4,"term":0,"trait":4,"legacy":0,"orderTable":78,"orderDeck":127},</text:p>
          </table:table-cell>
          <table:table-cell table:number-columns-repeated="16347"/>
        </table:table-row>
        <table:table-row table:style-name="ro2">
          <table:table-cell office:value-type="float" office:value="79" calcext:value-type="float">
            <text:p>79</text:p>
          </table:table-cell>
          <table:table-cell office:value-type="float" office:value="164" calcext:value-type="float">
            <text:p>164</text:p>
          </table:table-cell>
          <table:table-cell office:value-type="string" calcext:value-type="string">
            <text:p>1-40</text:p>
          </table:table-cell>
          <table:table-cell office:value-type="float" office:value="40" calcext:value-type="float">
            <text:p>40</text:p>
          </table:table-cell>
          <table:table-cell office:value-type="string" calcext:value-type="string">
            <text:p>大伴家持</text:p>
          </table:table-cell>
          <table:table-cell office:value-type="string" calcext:value-type="string">
            <text:p>おおとものやかもち</text:p>
          </table:table-cell>
          <table:table-cell office:value-type="string" calcext:value-type="string">
            <text:p>第１弾ブースターパック</text:p>
          </table:table-cell>
          <table:table-cell table:formula="of:=VLOOKUP([.G80];[$収録番号.$A$1:$収録番号.$B$9];2;0)" office:value-type="float" office:value="15" calcext:value-type="float">
            <text:p>15</text:p>
          </table:table-cell>
          <table:table-cell office:value-type="string" calcext:value-type="string">
            <text:p>R</text:p>
          </table:table-cell>
          <table:table-cell table:formula="of:=VLOOKUP([.I80];[$レアリティ番号.$A$1:$レアリティ番号.$B$4];2;0)" office:value-type="float" office:value="2" calcext:value-type="float">
            <text:p>2</text:p>
          </table:table-cell>
          <table:table-cell office:value-type="string" calcext:value-type="string">
            <text:p>イジン</text:p>
          </table:table-cell>
          <table:table-cell table:formula="of:=VLOOKUP([.K80];[$種類番号.$A$1:$種類番号.$B$4];2;0)" office:value-type="float" office:value="1" calcext:value-type="float">
            <text:p>1</text:p>
          </table:table-cell>
          <table:table-cell office:value-type="string" calcext:value-type="string">
            <text:p>緑</text:p>
          </table:table-cell>
          <table:table-cell table:formula="of:=VLOOKUP([.M80];[$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Q80];[$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80];[$特性番号.$A$1:$特性番号.$B$8];2;0);0)" office:value-type="float" office:value="0" calcext:value-type="float">
            <text:p>0</text:p>
          </table:table-cell>
          <table:table-cell office:value-type="string" calcext:value-type="string">
            <text:p>執筆 - ハイケイが戦場に置かれるたび、1ドローする。¶自分の戦場のハイケイ1つにつき「パワー+1000」を得る。</text:p>
          </table:table-cell>
          <table:table-cell table:style-name="ce8" table:formula="of:=NA()" office:value-type="string" office:string-value="" calcext:value-type="error">
            <text:p>#N/A</text:p>
          </table:table-cell>
          <table:table-cell table:formula="of:=IFERROR(VLOOKUP([.$V80];[$遺業能力番号.$A$1:$遺業能力番号.$B$9];2;0);0)" office:value-type="float" office:value="0" calcext:value-type="float">
            <text:p>0</text:p>
          </table:table-cell>
          <table:table-cell office:value-type="string" calcext:value-type="string">
            <text:p>https://one-draw.jp/ijinden/cardlist/001/card/01_040.png</text:p>
          </table:table-cell>
          <table:table-cell table:formula="of:=CONCATENATE([$JSON.$A$1];[.$C80];[$JSON.$B$1];[.$E80];[$JSON.$C$1];[.$F80];[$JSON.$D$1];IF(ISNA([.$S80]);&quot;null&quot;;&quot;&quot;&quot;&quot;&amp;[.$S80]&amp;&quot;&quot;&quot;&quot;);[$JSON.$E$1];[.$U80];[$JSON.$F$1];IF(ISNA([.$V80]);&quot;null&quot;;&quot;&quot;&quot;&quot;&amp;[.$V80]&amp;&quot;&quot;&quot;&quot;);[$JSON.$G$1];[.$X80];[$JSON.$H$1];[.$H80];[$JSON.$I$1];[.J80];[$JSON.$J$1];[.$L80];[$JSON.$K$1];[.$O80];[$JSON.$L$1];[.$N80];[$JSON.$M$1];[.$R80];[$JSON.$N$1];[.$T80];[$JSON.$O$1];[.$W80];[$JSON.$P$1];[.$A80];[$JSON.$Q$1];[.$B80];[$JSON.$R$1])" office:value-type="string" office:string-value="{&quot;id&quot;:&quot;1-40&quot;,&quot;name&quot;:&quot;大伴家持&quot;,&quot;kana&quot;:&quot;おおとものやかもち&quot;,&quot;traitText&quot;:null,&quot;ruleText&quot;:&quot;執筆 - ハイケイが戦場に置かれるたび、1ドローする。¶自分の戦場のハイケイ1つにつき「パワー+1000」を得る。&quot;,&quot;legacyText&quot;:null,&quot;imageUrl&quot;:&quot;https://one-draw.jp/ijinden/cardlist/001/card/01_040.png&quot;,&quot;expansion&quot;:15,&quot;rarity&quot;:2,&quot;type&quot;:1,&quot;level&quot;:5,&quot;color&quot;:4,&quot;term&quot;:2,&quot;trait&quot;:0,&quot;legacy&quot;:0,&quot;orderTable&quot;:79,&quot;orderDeck&quot;:164}," calcext:value-type="string">
            <text:p>{"id":"1-40","name":"大伴家持","kana":"おおとものやかもち","traitText":null,"ruleText":"執筆 - ハイケイが戦場に置かれるたび、1ドローする。¶自分の戦場のハイケイ1つにつき「パワー+1000」を得る。","legacyText":null,"imageUrl":"https://one-draw.jp/ijinden/cardlist/001/card/01_040.png","expansion":15,"rarity":2,"type":1,"level":5,"color":4,"term":2,"trait":0,"legacy":0,"orderTable":79,"orderDeck":164},</text:p>
          </table:table-cell>
          <table:table-cell table:number-columns-repeated="16347"/>
        </table:table-row>
        <table:table-row table:style-name="ro2">
          <table:table-cell office:value-type="float" office:value="80" calcext:value-type="float">
            <text:p>80</text:p>
          </table:table-cell>
          <table:table-cell office:value-type="float" office:value="165" calcext:value-type="float">
            <text:p>165</text:p>
          </table:table-cell>
          <table:table-cell office:value-type="string" calcext:value-type="string">
            <text:p>1-41</text:p>
          </table:table-cell>
          <table:table-cell office:value-type="float" office:value="41" calcext:value-type="float">
            <text:p>41</text:p>
          </table:table-cell>
          <table:table-cell office:value-type="string" calcext:value-type="string">
            <text:p>フランツ・ペーター・シューベルト</text:p>
          </table:table-cell>
          <table:table-cell office:value-type="string" calcext:value-type="string">
            <text:p>ふらんつぺーたーしゅーべると</text:p>
          </table:table-cell>
          <table:table-cell office:value-type="string" calcext:value-type="string">
            <text:p>第１弾ブースターパック</text:p>
          </table:table-cell>
          <table:table-cell table:formula="of:=VLOOKUP([.G81];[$収録番号.$A$1:$収録番号.$B$9];2;0)" office:value-type="float" office:value="15" calcext:value-type="float">
            <text:p>15</text:p>
          </table:table-cell>
          <table:table-cell office:value-type="string" calcext:value-type="string">
            <text:p>N</text:p>
          </table:table-cell>
          <table:table-cell table:formula="of:=VLOOKUP([.I81];[$レアリティ番号.$A$1:$レアリティ番号.$B$4];2;0)" office:value-type="float" office:value="1" calcext:value-type="float">
            <text:p>1</text:p>
          </table:table-cell>
          <table:table-cell office:value-type="string" calcext:value-type="string">
            <text:p>イジン</text:p>
          </table:table-cell>
          <table:table-cell table:formula="of:=VLOOKUP([.K81];[$種類番号.$A$1:$種類番号.$B$4];2;0)" office:value-type="float" office:value="1" calcext:value-type="float">
            <text:p>1</text:p>
          </table:table-cell>
          <table:table-cell office:value-type="string" calcext:value-type="string">
            <text:p>緑</text:p>
          </table:table-cell>
          <table:table-cell table:formula="of:=VLOOKUP([.M81];[$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1];[$能力語番号.$A$1:$能力語番号.$B$10];2;0);0)" office:value-type="float" office:value="0" calcext:value-type="float">
            <text:p>0</text:p>
          </table:table-cell>
          <table:table-cell office:value-type="string" calcext:value-type="string">
            <text:p>音楽</text:p>
          </table:table-cell>
          <table:table-cell table:formula="of:=IFERROR(VLOOKUP([.$S81];[$特性番号.$A$1:$特性番号.$B$8];2;0);0)" office:value-type="float" office:value="4" calcext:value-type="float">
            <text:p>4</text:p>
          </table:table-cell>
          <table:table-cell office:value-type="string" calcext:value-type="string">
            <text:p>戦場に名前の異なる「音楽」カードが2つ以上ある間、相手は墓地のカードを戦場に置くことができない。</text:p>
          </table:table-cell>
          <table:table-cell table:style-name="ce8" table:formula="of:=NA()" office:value-type="string" office:string-value="" calcext:value-type="error">
            <text:p>#N/A</text:p>
          </table:table-cell>
          <table:table-cell table:formula="of:=IFERROR(VLOOKUP([.$V81];[$遺業能力番号.$A$1:$遺業能力番号.$B$9];2;0);0)" office:value-type="float" office:value="0" calcext:value-type="float">
            <text:p>0</text:p>
          </table:table-cell>
          <table:table-cell office:value-type="string" calcext:value-type="string">
            <text:p>https://one-draw.jp/ijinden/cardlist/001/card/01_041.png</text:p>
          </table:table-cell>
          <table:table-cell table:formula="of:=CONCATENATE([$JSON.$A$1];[.$C81];[$JSON.$B$1];[.$E81];[$JSON.$C$1];[.$F81];[$JSON.$D$1];IF(ISNA([.$S81]);&quot;null&quot;;&quot;&quot;&quot;&quot;&amp;[.$S81]&amp;&quot;&quot;&quot;&quot;);[$JSON.$E$1];[.$U81];[$JSON.$F$1];IF(ISNA([.$V81]);&quot;null&quot;;&quot;&quot;&quot;&quot;&amp;[.$V81]&amp;&quot;&quot;&quot;&quot;);[$JSON.$G$1];[.$X81];[$JSON.$H$1];[.$H81];[$JSON.$I$1];[.J81];[$JSON.$J$1];[.$L81];[$JSON.$K$1];[.$O81];[$JSON.$L$1];[.$N81];[$JSON.$M$1];[.$R81];[$JSON.$N$1];[.$T81];[$JSON.$O$1];[.$W81];[$JSON.$P$1];[.$A81];[$JSON.$Q$1];[.$B81];[$JSON.$R$1])" office:value-type="string" office:string-value="{&quot;id&quot;:&quot;1-41&quot;,&quot;name&quot;:&quot;フランツ・ペーター・シューベルト&quot;,&quot;kana&quot;:&quot;ふらんつぺーたーしゅーべると&quot;,&quot;traitText&quot;:&quot;音楽&quot;,&quot;ruleText&quot;:&quot;戦場に名前の異なる「音楽」カードが2つ以上ある間、相手は墓地のカードを戦場に置くことができない。&quot;,&quot;legacyText&quot;:null,&quot;imageUrl&quot;:&quot;https://one-draw.jp/ijinden/cardlist/001/card/01_041.png&quot;,&quot;expansion&quot;:15,&quot;rarity&quot;:1,&quot;type&quot;:1,&quot;level&quot;:5,&quot;color&quot;:4,&quot;term&quot;:0,&quot;trait&quot;:4,&quot;legacy&quot;:0,&quot;orderTable&quot;:80,&quot;orderDeck&quot;:165}," calcext:value-type="string">
            <text:p>{"id":"1-41","name":"フランツ・ペーター・シューベルト","kana":"ふらんつぺーたーしゅーべると","traitText":"音楽","ruleText":"戦場に名前の異なる「音楽」カードが2つ以上ある間、相手は墓地のカードを戦場に置くことができない。","legacyText":null,"imageUrl":"https://one-draw.jp/ijinden/cardlist/001/card/01_041.png","expansion":15,"rarity":1,"type":1,"level":5,"color":4,"term":0,"trait":4,"legacy":0,"orderTable":80,"orderDeck":165},</text:p>
          </table:table-cell>
          <table:table-cell table:number-columns-repeated="16347"/>
        </table:table-row>
        <table:table-row table:style-name="ro2">
          <table:table-cell office:value-type="float" office:value="81" calcext:value-type="float">
            <text:p>81</text:p>
          </table:table-cell>
          <table:table-cell office:value-type="float" office:value="190" calcext:value-type="float">
            <text:p>190</text:p>
          </table:table-cell>
          <table:table-cell office:value-type="string" calcext:value-type="string">
            <text:p>1-42</text:p>
          </table:table-cell>
          <table:table-cell office:value-type="float" office:value="42" calcext:value-type="float">
            <text:p>42</text:p>
          </table:table-cell>
          <table:table-cell office:value-type="string" calcext:value-type="string">
            <text:p>空海</text:p>
          </table:table-cell>
          <table:table-cell office:value-type="string" calcext:value-type="string">
            <text:p>くうかい</text:p>
          </table:table-cell>
          <table:table-cell office:value-type="string" calcext:value-type="string">
            <text:p>第１弾ブースターパック</text:p>
          </table:table-cell>
          <table:table-cell table:formula="of:=VLOOKUP([.G82];[$収録番号.$A$1:$収録番号.$B$9];2;0)" office:value-type="float" office:value="15" calcext:value-type="float">
            <text:p>15</text:p>
          </table:table-cell>
          <table:table-cell office:value-type="string" calcext:value-type="string">
            <text:p>N</text:p>
          </table:table-cell>
          <table:table-cell table:formula="of:=VLOOKUP([.I82];[$レアリティ番号.$A$1:$レアリティ番号.$B$4];2;0)" office:value-type="float" office:value="1" calcext:value-type="float">
            <text:p>1</text:p>
          </table:table-cell>
          <table:table-cell office:value-type="string" calcext:value-type="string">
            <text:p>イジン</text:p>
          </table:table-cell>
          <table:table-cell table:formula="of:=VLOOKUP([.K82];[$種類番号.$A$1:$種類番号.$B$4];2;0)" office:value-type="float" office:value="1" calcext:value-type="float">
            <text:p>1</text:p>
          </table:table-cell>
          <table:table-cell office:value-type="string" calcext:value-type="string">
            <text:p>緑</text:p>
          </table:table-cell>
          <table:table-cell table:formula="of:=VLOOKUP([.M82];[$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Q82];[$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82];[$特性番号.$A$1:$特性番号.$B$8];2;0);0)" office:value-type="float" office:value="0" calcext:value-type="float">
            <text:p>0</text:p>
          </table:table-cell>
          <table:table-cell office:value-type="string" calcext:value-type="string">
            <text:p>航海 - アタッカーになったとき、自分の戦場のハイケイ1つを指定して発動できる。そのハイケイを手札に戻して、このターンの間「ダブルプレッシャー」を得る。</text:p>
          </table:table-cell>
          <table:table-cell table:style-name="ce8" office:value-type="string" calcext:value-type="string">
            <text:p>魔力化</text:p>
          </table:table-cell>
          <table:table-cell table:formula="of:=IFERROR(VLOOKUP([.$V82];[$遺業能力番号.$A$1:$遺業能力番号.$B$9];2;0);0)" office:value-type="float" office:value="1" calcext:value-type="float">
            <text:p>1</text:p>
          </table:table-cell>
          <table:table-cell office:value-type="string" calcext:value-type="string">
            <text:p>https://one-draw.jp/ijinden/cardlist/001/card/01_042.png</text:p>
          </table:table-cell>
          <table:table-cell table:formula="of:=CONCATENATE([$JSON.$A$1];[.$C82];[$JSON.$B$1];[.$E82];[$JSON.$C$1];[.$F82];[$JSON.$D$1];IF(ISNA([.$S82]);&quot;null&quot;;&quot;&quot;&quot;&quot;&amp;[.$S82]&amp;&quot;&quot;&quot;&quot;);[$JSON.$E$1];[.$U82];[$JSON.$F$1];IF(ISNA([.$V82]);&quot;null&quot;;&quot;&quot;&quot;&quot;&amp;[.$V82]&amp;&quot;&quot;&quot;&quot;);[$JSON.$G$1];[.$X82];[$JSON.$H$1];[.$H82];[$JSON.$I$1];[.J82];[$JSON.$J$1];[.$L82];[$JSON.$K$1];[.$O82];[$JSON.$L$1];[.$N82];[$JSON.$M$1];[.$R82];[$JSON.$N$1];[.$T82];[$JSON.$O$1];[.$W82];[$JSON.$P$1];[.$A82];[$JSON.$Q$1];[.$B82];[$JSON.$R$1])" office:value-type="string" office:string-value="{&quot;id&quot;:&quot;1-42&quot;,&quot;name&quot;:&quot;空海&quot;,&quot;kana&quot;:&quot;くうかい&quot;,&quot;traitText&quot;:null,&quot;ruleText&quot;:&quot;航海 - アタッカーになったとき、自分の戦場のハイケイ1つを指定して発動できる。そのハイケイを手札に戻して、このターンの間「ダブルプレッシャー」を得る。&quot;,&quot;legacyText&quot;:&quot;魔力化&quot;,&quot;imageUrl&quot;:&quot;https://one-draw.jp/ijinden/cardlist/001/card/01_042.png&quot;,&quot;expansion&quot;:15,&quot;rarity&quot;:1,&quot;type&quot;:1,&quot;level&quot;:6,&quot;color&quot;:4,&quot;term&quot;:1,&quot;trait&quot;:0,&quot;legacy&quot;:1,&quot;orderTable&quot;:81,&quot;orderDeck&quot;:190}," calcext:value-type="string">
            <text:p>{"id":"1-42","name":"空海","kana":"くうかい","traitText":null,"ruleText":"航海 - アタッカーになったとき、自分の戦場のハイケイ1つを指定して発動できる。そのハイケイを手札に戻して、このターンの間「ダブルプレッシャー」を得る。","legacyText":"魔力化","imageUrl":"https://one-draw.jp/ijinden/cardlist/001/card/01_042.png","expansion":15,"rarity":1,"type":1,"level":6,"color":4,"term":1,"trait":0,"legacy":1,"orderTable":81,"orderDeck":190},</text:p>
          </table:table-cell>
          <table:table-cell table:number-columns-repeated="16347"/>
        </table:table-row>
        <table:table-row table:style-name="ro2">
          <table:table-cell office:value-type="float" office:value="82" calcext:value-type="float">
            <text:p>82</text:p>
          </table:table-cell>
          <table:table-cell office:value-type="float" office:value="191" calcext:value-type="float">
            <text:p>191</text:p>
          </table:table-cell>
          <table:table-cell office:value-type="string" calcext:value-type="string">
            <text:p>1-43</text:p>
          </table:table-cell>
          <table:table-cell office:value-type="float" office:value="43" calcext:value-type="float">
            <text:p>43</text:p>
          </table:table-cell>
          <table:table-cell office:value-type="string" calcext:value-type="string">
            <text:p>清少納言</text:p>
          </table:table-cell>
          <table:table-cell office:value-type="string" calcext:value-type="string">
            <text:p>せいしょうなごん</text:p>
          </table:table-cell>
          <table:table-cell office:value-type="string" calcext:value-type="string">
            <text:p>第１弾ブースターパック</text:p>
          </table:table-cell>
          <table:table-cell table:formula="of:=VLOOKUP([.G83];[$収録番号.$A$1:$収録番号.$B$9];2;0)" office:value-type="float" office:value="15" calcext:value-type="float">
            <text:p>15</text:p>
          </table:table-cell>
          <table:table-cell office:value-type="string" calcext:value-type="string">
            <text:p>N</text:p>
          </table:table-cell>
          <table:table-cell table:formula="of:=VLOOKUP([.I83];[$レアリティ番号.$A$1:$レアリティ番号.$B$4];2;0)" office:value-type="float" office:value="1" calcext:value-type="float">
            <text:p>1</text:p>
          </table:table-cell>
          <table:table-cell office:value-type="string" calcext:value-type="string">
            <text:p>イジン</text:p>
          </table:table-cell>
          <table:table-cell table:formula="of:=VLOOKUP([.K83];[$種類番号.$A$1:$種類番号.$B$4];2;0)" office:value-type="float" office:value="1" calcext:value-type="float">
            <text:p>1</text:p>
          </table:table-cell>
          <table:table-cell office:value-type="string" calcext:value-type="string">
            <text:p>緑</text:p>
          </table:table-cell>
          <table:table-cell table:formula="of:=VLOOKUP([.M83];[$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執筆</text:p>
          </table:table-cell>
          <table:table-cell table:formula="of:=IFERROR(VLOOKUP([.$Q83];[$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83];[$特性番号.$A$1:$特性番号.$B$8];2;0);0)" office:value-type="float" office:value="0" calcext:value-type="float">
            <text:p>0</text:p>
          </table:table-cell>
          <table:table-cell office:value-type="string" calcext:value-type="string">
            <text:p>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text:p>
          </table:table-cell>
          <table:table-cell table:style-name="ce8" table:formula="of:=NA()" office:value-type="string" office:string-value="" calcext:value-type="error">
            <text:p>#N/A</text:p>
          </table:table-cell>
          <table:table-cell table:formula="of:=IFERROR(VLOOKUP([.$V83];[$遺業能力番号.$A$1:$遺業能力番号.$B$9];2;0);0)" office:value-type="float" office:value="0" calcext:value-type="float">
            <text:p>0</text:p>
          </table:table-cell>
          <table:table-cell office:value-type="string" calcext:value-type="string">
            <text:p>https://one-draw.jp/ijinden/cardlist/001/card/01_043.png</text:p>
          </table:table-cell>
          <table:table-cell table:formula="of:=CONCATENATE([$JSON.$A$1];[.$C83];[$JSON.$B$1];[.$E83];[$JSON.$C$1];[.$F83];[$JSON.$D$1];IF(ISNA([.$S83]);&quot;null&quot;;&quot;&quot;&quot;&quot;&amp;[.$S83]&amp;&quot;&quot;&quot;&quot;);[$JSON.$E$1];[.$U83];[$JSON.$F$1];IF(ISNA([.$V83]);&quot;null&quot;;&quot;&quot;&quot;&quot;&amp;[.$V83]&amp;&quot;&quot;&quot;&quot;);[$JSON.$G$1];[.$X83];[$JSON.$H$1];[.$H83];[$JSON.$I$1];[.J83];[$JSON.$J$1];[.$L83];[$JSON.$K$1];[.$O83];[$JSON.$L$1];[.$N83];[$JSON.$M$1];[.$R83];[$JSON.$N$1];[.$T83];[$JSON.$O$1];[.$W83];[$JSON.$P$1];[.$A83];[$JSON.$Q$1];[.$B83];[$JSON.$R$1])" office:value-type="string" office:string-value="{&quot;id&quot;:&quot;1-43&quot;,&quot;name&quot;:&quot;清少納言&quot;,&quot;kana&quot;:&quot;せいしょうなごん&quot;,&quot;traitText&quot;:null,&quot;ruleText&quot;:&quot;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quot;,&quot;legacyText&quot;:null,&quot;imageUrl&quot;:&quot;https://one-draw.jp/ijinden/cardlist/001/card/01_043.png&quot;,&quot;expansion&quot;:15,&quot;rarity&quot;:1,&quot;type&quot;:1,&quot;level&quot;:6,&quot;color&quot;:4,&quot;term&quot;:2,&quot;trait&quot;:0,&quot;legacy&quot;:0,&quot;orderTable&quot;:82,&quot;orderDeck&quot;:191}," calcext:value-type="string">
            <text:p>{"id":"1-43","name":"清少納言","kana":"せいしょうなごん","traitText":null,"ruleText":"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legacyText":null,"imageUrl":"https://one-draw.jp/ijinden/cardlist/001/card/01_043.png","expansion":15,"rarity":1,"type":1,"level":6,"color":4,"term":2,"trait":0,"legacy":0,"orderTable":82,"orderDeck":191},</text:p>
          </table:table-cell>
          <table:table-cell table:number-columns-repeated="16347"/>
        </table:table-row>
        <table:table-row table:style-name="ro2">
          <table:table-cell office:value-type="float" office:value="83" calcext:value-type="float">
            <text:p>83</text:p>
          </table:table-cell>
          <table:table-cell office:value-type="float" office:value="192" calcext:value-type="float">
            <text:p>192</text:p>
          </table:table-cell>
          <table:table-cell office:value-type="string" calcext:value-type="string">
            <text:p>1-44</text:p>
          </table:table-cell>
          <table:table-cell office:value-type="float" office:value="44" calcext:value-type="float">
            <text:p>44</text:p>
          </table:table-cell>
          <table:table-cell office:value-type="string" calcext:value-type="string">
            <text:p>ルートヴィヒ・ヴァン・ベートーヴェン</text:p>
          </table:table-cell>
          <table:table-cell office:value-type="string" calcext:value-type="string">
            <text:p>るーとゔぃひゔぁんべーとーゔぇん</text:p>
          </table:table-cell>
          <table:table-cell office:value-type="string" calcext:value-type="string">
            <text:p>第１弾ブースターパック</text:p>
          </table:table-cell>
          <table:table-cell table:formula="of:=VLOOKUP([.G84];[$収録番号.$A$1:$収録番号.$B$9];2;0)" office:value-type="float" office:value="15" calcext:value-type="float">
            <text:p>15</text:p>
          </table:table-cell>
          <table:table-cell office:value-type="string" calcext:value-type="string">
            <text:p>N</text:p>
          </table:table-cell>
          <table:table-cell table:formula="of:=VLOOKUP([.I84];[$レアリティ番号.$A$1:$レアリティ番号.$B$4];2;0)" office:value-type="float" office:value="1" calcext:value-type="float">
            <text:p>1</text:p>
          </table:table-cell>
          <table:table-cell office:value-type="string" calcext:value-type="string">
            <text:p>イジン</text:p>
          </table:table-cell>
          <table:table-cell table:formula="of:=VLOOKUP([.K84];[$種類番号.$A$1:$種類番号.$B$4];2;0)" office:value-type="float" office:value="1" calcext:value-type="float">
            <text:p>1</text:p>
          </table:table-cell>
          <table:table-cell office:value-type="string" calcext:value-type="string">
            <text:p>緑</text:p>
          </table:table-cell>
          <table:table-cell table:formula="of:=VLOOKUP([.M84];[$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4];[$能力語番号.$A$1:$能力語番号.$B$10];2;0);0)" office:value-type="float" office:value="0" calcext:value-type="float">
            <text:p>0</text:p>
          </table:table-cell>
          <table:table-cell office:value-type="string" calcext:value-type="string">
            <text:p>音楽</text:p>
          </table:table-cell>
          <table:table-cell table:formula="of:=IFERROR(VLOOKUP([.$S84];[$特性番号.$A$1:$特性番号.$B$8];2;0);0)" office:value-type="float" office:value="4" calcext:value-type="float">
            <text:p>4</text:p>
          </table:table-cell>
          <table:table-cell office:value-type="string" calcext:value-type="string">
            <text:p>戦場に名前の異なる「音楽」カードが3つ以上ある間、相手は墓地のカードを手札に戻すことができない。</text:p>
          </table:table-cell>
          <table:table-cell table:style-name="ce8" table:formula="of:=NA()" office:value-type="string" office:string-value="" calcext:value-type="error">
            <text:p>#N/A</text:p>
          </table:table-cell>
          <table:table-cell table:formula="of:=IFERROR(VLOOKUP([.$V84];[$遺業能力番号.$A$1:$遺業能力番号.$B$9];2;0);0)" office:value-type="float" office:value="0" calcext:value-type="float">
            <text:p>0</text:p>
          </table:table-cell>
          <table:table-cell office:value-type="string" calcext:value-type="string">
            <text:p>https://one-draw.jp/ijinden/cardlist/001/card/01_044.png</text:p>
          </table:table-cell>
          <table:table-cell table:formula="of:=CONCATENATE([$JSON.$A$1];[.$C84];[$JSON.$B$1];[.$E84];[$JSON.$C$1];[.$F84];[$JSON.$D$1];IF(ISNA([.$S84]);&quot;null&quot;;&quot;&quot;&quot;&quot;&amp;[.$S84]&amp;&quot;&quot;&quot;&quot;);[$JSON.$E$1];[.$U84];[$JSON.$F$1];IF(ISNA([.$V84]);&quot;null&quot;;&quot;&quot;&quot;&quot;&amp;[.$V84]&amp;&quot;&quot;&quot;&quot;);[$JSON.$G$1];[.$X84];[$JSON.$H$1];[.$H84];[$JSON.$I$1];[.J84];[$JSON.$J$1];[.$L84];[$JSON.$K$1];[.$O84];[$JSON.$L$1];[.$N84];[$JSON.$M$1];[.$R84];[$JSON.$N$1];[.$T84];[$JSON.$O$1];[.$W84];[$JSON.$P$1];[.$A84];[$JSON.$Q$1];[.$B84];[$JSON.$R$1])" office:value-type="string" office:string-value="{&quot;id&quot;:&quot;1-44&quot;,&quot;name&quot;:&quot;ルートヴィヒ・ヴァン・ベートーヴェン&quot;,&quot;kana&quot;:&quot;るーとゔぃひゔぁんべーとーゔぇん&quot;,&quot;traitText&quot;:&quot;音楽&quot;,&quot;ruleText&quot;:&quot;戦場に名前の異なる「音楽」カードが3つ以上ある間、相手は墓地のカードを手札に戻すことができない。&quot;,&quot;legacyText&quot;:null,&quot;imageUrl&quot;:&quot;https://one-draw.jp/ijinden/cardlist/001/card/01_044.png&quot;,&quot;expansion&quot;:15,&quot;rarity&quot;:1,&quot;type&quot;:1,&quot;level&quot;:6,&quot;color&quot;:4,&quot;term&quot;:0,&quot;trait&quot;:4,&quot;legacy&quot;:0,&quot;orderTable&quot;:83,&quot;orderDeck&quot;:192}," calcext:value-type="string">
            <text:p>{"id":"1-44","name":"ルートヴィヒ・ヴァン・ベートーヴェン","kana":"るーとゔぃひゔぁんべーとーゔぇん","traitText":"音楽","ruleText":"戦場に名前の異なる「音楽」カードが3つ以上ある間、相手は墓地のカードを手札に戻すことができない。","legacyText":null,"imageUrl":"https://one-draw.jp/ijinden/cardlist/001/card/01_044.png","expansion":15,"rarity":1,"type":1,"level":6,"color":4,"term":0,"trait":4,"legacy":0,"orderTable":83,"orderDeck":192},</text:p>
          </table:table-cell>
          <table:table-cell table:number-columns-repeated="16347"/>
        </table:table-row>
        <table:table-row table:style-name="ro2">
          <table:table-cell office:value-type="float" office:value="84" calcext:value-type="float">
            <text:p>84</text:p>
          </table:table-cell>
          <table:table-cell office:value-type="float" office:value="209" calcext:value-type="float">
            <text:p>209</text:p>
          </table:table-cell>
          <table:table-cell office:value-type="string" calcext:value-type="string">
            <text:p>1-45</text:p>
          </table:table-cell>
          <table:table-cell office:value-type="float" office:value="45" calcext:value-type="float">
            <text:p>45</text:p>
          </table:table-cell>
          <table:table-cell office:value-type="string" calcext:value-type="string">
            <text:p>行基</text:p>
          </table:table-cell>
          <table:table-cell office:value-type="string" calcext:value-type="string">
            <text:p>ぎょうき</text:p>
          </table:table-cell>
          <table:table-cell office:value-type="string" calcext:value-type="string">
            <text:p>第１弾ブースターパック</text:p>
          </table:table-cell>
          <table:table-cell table:formula="of:=VLOOKUP([.G85];[$収録番号.$A$1:$収録番号.$B$9];2;0)" office:value-type="float" office:value="15" calcext:value-type="float">
            <text:p>15</text:p>
          </table:table-cell>
          <table:table-cell office:value-type="string" calcext:value-type="string">
            <text:p>R</text:p>
          </table:table-cell>
          <table:table-cell table:formula="of:=VLOOKUP([.I85];[$レアリティ番号.$A$1:$レアリティ番号.$B$4];2;0)" office:value-type="float" office:value="2" calcext:value-type="float">
            <text:p>2</text:p>
          </table:table-cell>
          <table:table-cell office:value-type="string" calcext:value-type="string">
            <text:p>イジン</text:p>
          </table:table-cell>
          <table:table-cell table:formula="of:=VLOOKUP([.K85];[$種類番号.$A$1:$種類番号.$B$4];2;0)" office:value-type="float" office:value="1" calcext:value-type="float">
            <text:p>1</text:p>
          </table:table-cell>
          <table:table-cell office:value-type="string" calcext:value-type="string">
            <text:p>緑</text:p>
          </table:table-cell>
          <table:table-cell table:formula="of:=VLOOKUP([.M85];[$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85];[$特性番号.$A$1:$特性番号.$B$8];2;0);0)" office:value-type="float" office:value="0" calcext:value-type="float">
            <text:p>0</text:p>
          </table:table-cell>
          <table:table-cell office:value-type="string" calcext:value-type="string">
            <text:p>戦場に置かれたとき、イジン召喚権+1して、自分の戦場のハイケイ1つにつき1ドローする。¶これが戦場にいる間、自分の戦場のハイケイは破壊されない。</text:p>
          </table:table-cell>
          <table:table-cell table:style-name="ce8" office:value-type="string" calcext:value-type="string">
            <text:p>1ドローする</text:p>
          </table:table-cell>
          <table:table-cell table:formula="of:=IFERROR(VLOOKUP([.$V85];[$遺業能力番号.$A$1:$遺業能力番号.$B$9];2;0);0)" office:value-type="float" office:value="4" calcext:value-type="float">
            <text:p>4</text:p>
          </table:table-cell>
          <table:table-cell office:value-type="string" calcext:value-type="string">
            <text:p>https://one-draw.jp/ijinden/cardlist/001/card/01_045.png</text:p>
          </table:table-cell>
          <table:table-cell table:formula="of:=CONCATENATE([$JSON.$A$1];[.$C85];[$JSON.$B$1];[.$E85];[$JSON.$C$1];[.$F85];[$JSON.$D$1];IF(ISNA([.$S85]);&quot;null&quot;;&quot;&quot;&quot;&quot;&amp;[.$S85]&amp;&quot;&quot;&quot;&quot;);[$JSON.$E$1];[.$U85];[$JSON.$F$1];IF(ISNA([.$V85]);&quot;null&quot;;&quot;&quot;&quot;&quot;&amp;[.$V85]&amp;&quot;&quot;&quot;&quot;);[$JSON.$G$1];[.$X85];[$JSON.$H$1];[.$H85];[$JSON.$I$1];[.J85];[$JSON.$J$1];[.$L85];[$JSON.$K$1];[.$O85];[$JSON.$L$1];[.$N85];[$JSON.$M$1];[.$R85];[$JSON.$N$1];[.$T85];[$JSON.$O$1];[.$W85];[$JSON.$P$1];[.$A85];[$JSON.$Q$1];[.$B85];[$JSON.$R$1])" office:value-type="string" office:string-value="{&quot;id&quot;:&quot;1-45&quot;,&quot;name&quot;:&quot;行基&quot;,&quot;kana&quot;:&quot;ぎょうき&quot;,&quot;traitText&quot;:null,&quot;ruleText&quot;:&quot;戦場に置かれたとき、イジン召喚権+1して、自分の戦場のハイケイ1つにつき1ドローする。¶これが戦場にいる間、自分の戦場のハイケイは破壊されない。&quot;,&quot;legacyText&quot;:&quot;1ドローする&quot;,&quot;imageUrl&quot;:&quot;https://one-draw.jp/ijinden/cardlist/001/card/01_045.png&quot;,&quot;expansion&quot;:15,&quot;rarity&quot;:2,&quot;type&quot;:1,&quot;level&quot;:7,&quot;color&quot;:4,&quot;term&quot;:0,&quot;trait&quot;:0,&quot;legacy&quot;:4,&quot;orderTable&quot;:84,&quot;orderDeck&quot;:209}," calcext:value-type="string">
            <text:p>{"id":"1-45","name":"行基","kana":"ぎょうき","traitText":null,"ruleText":"戦場に置かれたとき、イジン召喚権+1して、自分の戦場のハイケイ1つにつき1ドローする。¶これが戦場にいる間、自分の戦場のハイケイは破壊されない。","legacyText":"1ドローする","imageUrl":"https://one-draw.jp/ijinden/cardlist/001/card/01_045.png","expansion":15,"rarity":2,"type":1,"level":7,"color":4,"term":0,"trait":0,"legacy":4,"orderTable":84,"orderDeck":209},</text:p>
          </table:table-cell>
          <table:table-cell table:number-columns-repeated="16347"/>
        </table:table-row>
        <table:table-row table:style-name="ro2">
          <table:table-cell office:value-type="float" office:value="85" calcext:value-type="float">
            <text:p>85</text:p>
          </table:table-cell>
          <table:table-cell office:value-type="float" office:value="259" calcext:value-type="float">
            <text:p>259</text:p>
          </table:table-cell>
          <table:table-cell office:value-type="string" calcext:value-type="string">
            <text:p>1-46</text:p>
          </table:table-cell>
          <table:table-cell office:value-type="float" office:value="46" calcext:value-type="float">
            <text:p>46</text:p>
          </table:table-cell>
          <table:table-cell office:value-type="string" calcext:value-type="string">
            <text:p>武者の蔵</text:p>
          </table:table-cell>
          <table:table-cell office:value-type="string" calcext:value-type="string">
            <text:p>むしゃのくら</text:p>
          </table:table-cell>
          <table:table-cell office:value-type="string" calcext:value-type="string">
            <text:p>第１弾ブースターパック</text:p>
          </table:table-cell>
          <table:table-cell table:formula="of:=VLOOKUP([.G86];[$収録番号.$A$1:$収録番号.$B$9];2;0)" office:value-type="float" office:value="15" calcext:value-type="float">
            <text:p>15</text:p>
          </table:table-cell>
          <table:table-cell office:value-type="string" calcext:value-type="string">
            <text:p>N</text:p>
          </table:table-cell>
          <table:table-cell table:formula="of:=VLOOKUP([.I86];[$レアリティ番号.$A$1:$レアリティ番号.$B$4];2;0)" office:value-type="float" office:value="1" calcext:value-type="float">
            <text:p>1</text:p>
          </table:table-cell>
          <table:table-cell office:value-type="string" calcext:value-type="string">
            <text:p>ハイケイ</text:p>
          </table:table-cell>
          <table:table-cell table:formula="of:=VLOOKUP([.K86];[$種類番号.$A$1:$種類番号.$B$4];2;0)" office:value-type="float" office:value="2" calcext:value-type="float">
            <text:p>2</text:p>
          </table:table-cell>
          <table:table-cell office:value-type="string" calcext:value-type="string">
            <text:p>赤</text:p>
          </table:table-cell>
          <table:table-cell table:formula="of:=VLOOKUP([.M86];[$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86];[$特性番号.$A$1:$特性番号.$B$8];2;0);0)" office:value-type="float" office:value="0" calcext:value-type="float">
            <text:p>0</text:p>
          </table:table-cell>
          <table:table-cell office:value-type="string" calcext:value-type="string">
            <text:p>これが戦場にある間、自分の戦場のレベル2以下のイジンは「特性：剣術」を得る。¶これが戦場にある間、自分の戦場の「剣術」イジンは「即応」を得る。</text:p>
          </table:table-cell>
          <table:table-cell table:style-name="ce8" office:value-type="string" calcext:value-type="string">
            <text:p>魔力化</text:p>
          </table:table-cell>
          <table:table-cell table:formula="of:=IFERROR(VLOOKUP([.$V86];[$遺業能力番号.$A$1:$遺業能力番号.$B$9];2;0);0)" office:value-type="float" office:value="1" calcext:value-type="float">
            <text:p>1</text:p>
          </table:table-cell>
          <table:table-cell office:value-type="string" calcext:value-type="string">
            <text:p>https://one-draw.jp/ijinden/cardlist/001/card/01_046.png</text:p>
          </table:table-cell>
          <table:table-cell table:formula="of:=CONCATENATE([$JSON.$A$1];[.$C86];[$JSON.$B$1];[.$E86];[$JSON.$C$1];[.$F86];[$JSON.$D$1];IF(ISNA([.$S86]);&quot;null&quot;;&quot;&quot;&quot;&quot;&amp;[.$S86]&amp;&quot;&quot;&quot;&quot;);[$JSON.$E$1];[.$U86];[$JSON.$F$1];IF(ISNA([.$V86]);&quot;null&quot;;&quot;&quot;&quot;&quot;&amp;[.$V86]&amp;&quot;&quot;&quot;&quot;);[$JSON.$G$1];[.$X86];[$JSON.$H$1];[.$H86];[$JSON.$I$1];[.J86];[$JSON.$J$1];[.$L86];[$JSON.$K$1];[.$O86];[$JSON.$L$1];[.$N86];[$JSON.$M$1];[.$R86];[$JSON.$N$1];[.$T86];[$JSON.$O$1];[.$W86];[$JSON.$P$1];[.$A86];[$JSON.$Q$1];[.$B86];[$JSON.$R$1])" office:value-type="string" office:string-value="{&quot;id&quot;:&quot;1-46&quot;,&quot;name&quot;:&quot;武者の蔵&quot;,&quot;kana&quot;:&quot;むしゃのくら&quot;,&quot;traitText&quot;:null,&quot;ruleText&quot;:&quot;これが戦場にある間、自分の戦場のレベル2以下のイジンは「特性：剣術」を得る。¶これが戦場にある間、自分の戦場の「剣術」イジンは「即応」を得る。&quot;,&quot;legacyText&quot;:&quot;魔力化&quot;,&quot;imageUrl&quot;:&quot;https://one-draw.jp/ijinden/cardlist/001/card/01_046.png&quot;,&quot;expansion&quot;:15,&quot;rarity&quot;:1,&quot;type&quot;:2,&quot;level&quot;:4,&quot;color&quot;:1,&quot;term&quot;:0,&quot;trait&quot;:0,&quot;legacy&quot;:1,&quot;orderTable&quot;:85,&quot;orderDeck&quot;:259}," calcext:value-type="string">
            <text:p>{"id":"1-46","name":"武者の蔵","kana":"むしゃのくら","traitText":null,"ruleText":"これが戦場にある間、自分の戦場のレベル2以下のイジンは「特性：剣術」を得る。¶これが戦場にある間、自分の戦場の「剣術」イジンは「即応」を得る。","legacyText":"魔力化","imageUrl":"https://one-draw.jp/ijinden/cardlist/001/card/01_046.png","expansion":15,"rarity":1,"type":2,"level":4,"color":1,"term":0,"trait":0,"legacy":1,"orderTable":85,"orderDeck":259},</text:p>
          </table:table-cell>
          <table:table-cell table:number-columns-repeated="16347"/>
        </table:table-row>
        <table:table-row table:style-name="ro2">
          <table:table-cell office:value-type="float" office:value="86" calcext:value-type="float">
            <text:p>86</text:p>
          </table:table-cell>
          <table:table-cell office:value-type="float" office:value="260" calcext:value-type="float">
            <text:p>260</text:p>
          </table:table-cell>
          <table:table-cell office:value-type="string" calcext:value-type="string">
            <text:p>1-47</text:p>
          </table:table-cell>
          <table:table-cell office:value-type="float" office:value="47" calcext:value-type="float">
            <text:p>47</text:p>
          </table:table-cell>
          <table:table-cell office:value-type="string" calcext:value-type="string">
            <text:p>純白の塔</text:p>
          </table:table-cell>
          <table:table-cell office:value-type="string" calcext:value-type="string">
            <text:p>じゅんぱくのとう</text:p>
          </table:table-cell>
          <table:table-cell office:value-type="string" calcext:value-type="string">
            <text:p>第１弾ブースターパック</text:p>
          </table:table-cell>
          <table:table-cell table:formula="of:=VLOOKUP([.G87];[$収録番号.$A$1:$収録番号.$B$9];2;0)" office:value-type="float" office:value="15" calcext:value-type="float">
            <text:p>15</text:p>
          </table:table-cell>
          <table:table-cell office:value-type="string" calcext:value-type="string">
            <text:p>N</text:p>
          </table:table-cell>
          <table:table-cell table:formula="of:=VLOOKUP([.I87];[$レアリティ番号.$A$1:$レアリティ番号.$B$4];2;0)" office:value-type="float" office:value="1" calcext:value-type="float">
            <text:p>1</text:p>
          </table:table-cell>
          <table:table-cell office:value-type="string" calcext:value-type="string">
            <text:p>ハイケイ</text:p>
          </table:table-cell>
          <table:table-cell table:formula="of:=VLOOKUP([.K87];[$種類番号.$A$1:$種類番号.$B$4];2;0)" office:value-type="float" office:value="2" calcext:value-type="float">
            <text:p>2</text:p>
          </table:table-cell>
          <table:table-cell office:value-type="string" calcext:value-type="string">
            <text:p>青</text:p>
          </table:table-cell>
          <table:table-cell table:formula="of:=VLOOKUP([.M87];[$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87];[$特性番号.$A$1:$特性番号.$B$8];2;0);0)" office:value-type="float" office:value="0" calcext:value-type="float">
            <text:p>0</text:p>
          </table:table-cell>
          <table:table-cell office:value-type="string" calcext:value-type="string">
            <text:p>自分が3体以上でアタックしたとき、アタッカー1体を指定して発動できる。そのアタッカーは、このターンの間「イジンにブロックされない」を得る。</text:p>
          </table:table-cell>
          <table:table-cell table:style-name="ce8" office:value-type="string" calcext:value-type="string">
            <text:p>手札に戻す</text:p>
          </table:table-cell>
          <table:table-cell table:formula="of:=IFERROR(VLOOKUP([.$V87];[$遺業能力番号.$A$1:$遺業能力番号.$B$9];2;0);0)" office:value-type="float" office:value="5" calcext:value-type="float">
            <text:p>5</text:p>
          </table:table-cell>
          <table:table-cell office:value-type="string" calcext:value-type="string">
            <text:p>https://one-draw.jp/ijinden/cardlist/001/card/01_047.png</text:p>
          </table:table-cell>
          <table:table-cell table:formula="of:=CONCATENATE([$JSON.$A$1];[.$C87];[$JSON.$B$1];[.$E87];[$JSON.$C$1];[.$F87];[$JSON.$D$1];IF(ISNA([.$S87]);&quot;null&quot;;&quot;&quot;&quot;&quot;&amp;[.$S87]&amp;&quot;&quot;&quot;&quot;);[$JSON.$E$1];[.$U87];[$JSON.$F$1];IF(ISNA([.$V87]);&quot;null&quot;;&quot;&quot;&quot;&quot;&amp;[.$V87]&amp;&quot;&quot;&quot;&quot;);[$JSON.$G$1];[.$X87];[$JSON.$H$1];[.$H87];[$JSON.$I$1];[.J87];[$JSON.$J$1];[.$L87];[$JSON.$K$1];[.$O87];[$JSON.$L$1];[.$N87];[$JSON.$M$1];[.$R87];[$JSON.$N$1];[.$T87];[$JSON.$O$1];[.$W87];[$JSON.$P$1];[.$A87];[$JSON.$Q$1];[.$B87];[$JSON.$R$1])" office:value-type="string" office:string-value="{&quot;id&quot;:&quot;1-47&quot;,&quot;name&quot;:&quot;純白の塔&quot;,&quot;kana&quot;:&quot;じゅんぱくのとう&quot;,&quot;traitText&quot;:null,&quot;ruleText&quot;:&quot;自分が3体以上でアタックしたとき、アタッカー1体を指定して発動できる。そのアタッカーは、このターンの間「イジンにブロックされない」を得る。&quot;,&quot;legacyText&quot;:&quot;手札に戻す&quot;,&quot;imageUrl&quot;:&quot;https://one-draw.jp/ijinden/cardlist/001/card/01_047.png&quot;,&quot;expansion&quot;:15,&quot;rarity&quot;:1,&quot;type&quot;:2,&quot;level&quot;:4,&quot;color&quot;:2,&quot;term&quot;:0,&quot;trait&quot;:0,&quot;legacy&quot;:5,&quot;orderTable&quot;:86,&quot;orderDeck&quot;:260}," calcext:value-type="string">
            <text:p>{"id":"1-47","name":"純白の塔","kana":"じゅんぱくのとう","traitText":null,"ruleText":"自分が3体以上でアタックしたとき、アタッカー1体を指定して発動できる。そのアタッカーは、このターンの間「イジンにブロックされない」を得る。","legacyText":"手札に戻す","imageUrl":"https://one-draw.jp/ijinden/cardlist/001/card/01_047.png","expansion":15,"rarity":1,"type":2,"level":4,"color":2,"term":0,"trait":0,"legacy":5,"orderTable":86,"orderDeck":260},</text:p>
          </table:table-cell>
          <table:table-cell table:number-columns-repeated="16347"/>
        </table:table-row>
        <table:table-row table:style-name="ro2">
          <table:table-cell office:value-type="float" office:value="87" calcext:value-type="float">
            <text:p>87</text:p>
          </table:table-cell>
          <table:table-cell office:value-type="float" office:value="267" calcext:value-type="float">
            <text:p>267</text:p>
          </table:table-cell>
          <table:table-cell office:value-type="string" calcext:value-type="string">
            <text:p>1-48</text:p>
          </table:table-cell>
          <table:table-cell office:value-type="float" office:value="48" calcext:value-type="float">
            <text:p>48</text:p>
          </table:table-cell>
          <table:table-cell office:value-type="string" calcext:value-type="string">
            <text:p>円形闘技場</text:p>
          </table:table-cell>
          <table:table-cell office:value-type="string" calcext:value-type="string">
            <text:p>えんけいとうぎじょう</text:p>
          </table:table-cell>
          <table:table-cell office:value-type="string" calcext:value-type="string">
            <text:p>第１弾ブースターパック</text:p>
          </table:table-cell>
          <table:table-cell table:formula="of:=VLOOKUP([.G88];[$収録番号.$A$1:$収録番号.$B$9];2;0)" office:value-type="float" office:value="15" calcext:value-type="float">
            <text:p>15</text:p>
          </table:table-cell>
          <table:table-cell office:value-type="string" calcext:value-type="string">
            <text:p>N</text:p>
          </table:table-cell>
          <table:table-cell table:formula="of:=VLOOKUP([.I88];[$レアリティ番号.$A$1:$レアリティ番号.$B$4];2;0)" office:value-type="float" office:value="1" calcext:value-type="float">
            <text:p>1</text:p>
          </table:table-cell>
          <table:table-cell office:value-type="string" calcext:value-type="string">
            <text:p>ハイケイ</text:p>
          </table:table-cell>
          <table:table-cell table:formula="of:=VLOOKUP([.K88];[$種類番号.$A$1:$種類番号.$B$4];2;0)" office:value-type="float" office:value="2" calcext:value-type="float">
            <text:p>2</text:p>
          </table:table-cell>
          <table:table-cell office:value-type="string" calcext:value-type="string">
            <text:p>青</text:p>
          </table:table-cell>
          <table:table-cell table:formula="of:=VLOOKUP([.M88];[$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88];[$特性番号.$A$1:$特性番号.$B$8];2;0);0)" office:value-type="float" office:value="0" calcext:value-type="float">
            <text:p>0</text:p>
          </table:table-cell>
          <table:table-cell office:value-type="string" calcext:value-type="string">
            <text:p>自分のターンの間、自分の戦場のガーディアンは「即応」を持つパワー3000のイジンでもある。</text:p>
          </table:table-cell>
          <table:table-cell table:style-name="ce8" table:formula="of:=NA()" office:value-type="string" office:string-value="" calcext:value-type="error">
            <text:p>#N/A</text:p>
          </table:table-cell>
          <table:table-cell table:formula="of:=IFERROR(VLOOKUP([.$V88];[$遺業能力番号.$A$1:$遺業能力番号.$B$9];2;0);0)" office:value-type="float" office:value="0" calcext:value-type="float">
            <text:p>0</text:p>
          </table:table-cell>
          <table:table-cell office:value-type="string" calcext:value-type="string">
            <text:p>https://one-draw.jp/ijinden/cardlist/001/card/01_048.png</text:p>
          </table:table-cell>
          <table:table-cell table:formula="of:=CONCATENATE([$JSON.$A$1];[.$C88];[$JSON.$B$1];[.$E88];[$JSON.$C$1];[.$F88];[$JSON.$D$1];IF(ISNA([.$S88]);&quot;null&quot;;&quot;&quot;&quot;&quot;&amp;[.$S88]&amp;&quot;&quot;&quot;&quot;);[$JSON.$E$1];[.$U88];[$JSON.$F$1];IF(ISNA([.$V88]);&quot;null&quot;;&quot;&quot;&quot;&quot;&amp;[.$V88]&amp;&quot;&quot;&quot;&quot;);[$JSON.$G$1];[.$X88];[$JSON.$H$1];[.$H88];[$JSON.$I$1];[.J88];[$JSON.$J$1];[.$L88];[$JSON.$K$1];[.$O88];[$JSON.$L$1];[.$N88];[$JSON.$M$1];[.$R88];[$JSON.$N$1];[.$T88];[$JSON.$O$1];[.$W88];[$JSON.$P$1];[.$A88];[$JSON.$Q$1];[.$B88];[$JSON.$R$1])" office:value-type="string" office:string-value="{&quot;id&quot;:&quot;1-48&quot;,&quot;name&quot;:&quot;円形闘技場&quot;,&quot;kana&quot;:&quot;えんけいとうぎじょう&quot;,&quot;traitText&quot;:null,&quot;ruleText&quot;:&quot;自分のターンの間、自分の戦場のガーディアンは「即応」を持つパワー3000のイジンでもある。&quot;,&quot;legacyText&quot;:null,&quot;imageUrl&quot;:&quot;https://one-draw.jp/ijinden/cardlist/001/card/01_048.png&quot;,&quot;expansion&quot;:15,&quot;rarity&quot;:1,&quot;type&quot;:2,&quot;level&quot;:5,&quot;color&quot;:2,&quot;term&quot;:0,&quot;trait&quot;:0,&quot;legacy&quot;:0,&quot;orderTable&quot;:87,&quot;orderDeck&quot;:267}," calcext:value-type="string">
            <text:p>{"id":"1-48","name":"円形闘技場","kana":"えんけいとうぎじょう","traitText":null,"ruleText":"自分のターンの間、自分の戦場のガーディアンは「即応」を持つパワー3000のイジンでもある。","legacyText":null,"imageUrl":"https://one-draw.jp/ijinden/cardlist/001/card/01_048.png","expansion":15,"rarity":1,"type":2,"level":5,"color":2,"term":0,"trait":0,"legacy":0,"orderTable":87,"orderDeck":267},</text:p>
          </table:table-cell>
          <table:table-cell table:number-columns-repeated="16347"/>
        </table:table-row>
        <table:table-row table:style-name="ro2">
          <table:table-cell office:value-type="float" office:value="88" calcext:value-type="float">
            <text:p>88</text:p>
          </table:table-cell>
          <table:table-cell office:value-type="float" office:value="243" calcext:value-type="float">
            <text:p>243</text:p>
          </table:table-cell>
          <table:table-cell office:value-type="string" calcext:value-type="string">
            <text:p>1-49</text:p>
          </table:table-cell>
          <table:table-cell office:value-type="float" office:value="49" calcext:value-type="float">
            <text:p>49</text:p>
          </table:table-cell>
          <table:table-cell office:value-type="string" calcext:value-type="string">
            <text:p>巨大古墳</text:p>
          </table:table-cell>
          <table:table-cell office:value-type="string" calcext:value-type="string">
            <text:p>きょだいこふん</text:p>
          </table:table-cell>
          <table:table-cell office:value-type="string" calcext:value-type="string">
            <text:p>第１弾ブースターパック</text:p>
          </table:table-cell>
          <table:table-cell table:formula="of:=VLOOKUP([.G89];[$収録番号.$A$1:$収録番号.$B$9];2;0)" office:value-type="float" office:value="15" calcext:value-type="float">
            <text:p>15</text:p>
          </table:table-cell>
          <table:table-cell office:value-type="string" calcext:value-type="string">
            <text:p>N</text:p>
          </table:table-cell>
          <table:table-cell table:formula="of:=VLOOKUP([.I89];[$レアリティ番号.$A$1:$レアリティ番号.$B$4];2;0)" office:value-type="float" office:value="1" calcext:value-type="float">
            <text:p>1</text:p>
          </table:table-cell>
          <table:table-cell office:value-type="string" calcext:value-type="string">
            <text:p>ハイケイ</text:p>
          </table:table-cell>
          <table:table-cell table:formula="of:=VLOOKUP([.K89];[$種類番号.$A$1:$種類番号.$B$4];2;0)" office:value-type="float" office:value="2" calcext:value-type="float">
            <text:p>2</text:p>
          </table:table-cell>
          <table:table-cell office:value-type="string" calcext:value-type="string">
            <text:p>緑</text:p>
          </table:table-cell>
          <table:table-cell table:formula="of:=VLOOKUP([.M8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89];[$特性番号.$A$1:$特性番号.$B$8];2;0);0)" office:value-type="float" office:value="0" calcext:value-type="float">
            <text:p>0</text:p>
          </table:table-cell>
          <table:table-cell office:value-type="string" calcext:value-type="string">
            <text:p>自分のスタートフェイズが終了したとき、マリョク配置権+1する。</text:p>
          </table:table-cell>
          <table:table-cell table:style-name="ce8" office:value-type="string" calcext:value-type="string">
            <text:p>魔力化</text:p>
          </table:table-cell>
          <table:table-cell table:formula="of:=IFERROR(VLOOKUP([.$V89];[$遺業能力番号.$A$1:$遺業能力番号.$B$9];2;0);0)" office:value-type="float" office:value="1" calcext:value-type="float">
            <text:p>1</text:p>
          </table:table-cell>
          <table:table-cell office:value-type="string" calcext:value-type="string">
            <text:p>https://one-draw.jp/ijinden/cardlist/001/card/01_049.png</text:p>
          </table:table-cell>
          <table:table-cell table:formula="of:=CONCATENATE([$JSON.$A$1];[.$C89];[$JSON.$B$1];[.$E89];[$JSON.$C$1];[.$F89];[$JSON.$D$1];IF(ISNA([.$S89]);&quot;null&quot;;&quot;&quot;&quot;&quot;&amp;[.$S89]&amp;&quot;&quot;&quot;&quot;);[$JSON.$E$1];[.$U89];[$JSON.$F$1];IF(ISNA([.$V89]);&quot;null&quot;;&quot;&quot;&quot;&quot;&amp;[.$V89]&amp;&quot;&quot;&quot;&quot;);[$JSON.$G$1];[.$X89];[$JSON.$H$1];[.$H89];[$JSON.$I$1];[.J89];[$JSON.$J$1];[.$L89];[$JSON.$K$1];[.$O89];[$JSON.$L$1];[.$N89];[$JSON.$M$1];[.$R89];[$JSON.$N$1];[.$T89];[$JSON.$O$1];[.$W89];[$JSON.$P$1];[.$A89];[$JSON.$Q$1];[.$B89];[$JSON.$R$1])" office:value-type="string" office:string-value="{&quot;id&quot;:&quot;1-49&quot;,&quot;name&quot;:&quot;巨大古墳&quot;,&quot;kana&quot;:&quot;きょだいこふん&quot;,&quot;traitText&quot;:null,&quot;ruleText&quot;:&quot;自分のスタートフェイズが終了したとき、マリョク配置権+1する。&quot;,&quot;legacyText&quot;:&quot;魔力化&quot;,&quot;imageUrl&quot;:&quot;https://one-draw.jp/ijinden/cardlist/001/card/01_049.png&quot;,&quot;expansion&quot;:15,&quot;rarity&quot;:1,&quot;type&quot;:2,&quot;level&quot;:2,&quot;color&quot;:4,&quot;term&quot;:0,&quot;trait&quot;:0,&quot;legacy&quot;:1,&quot;orderTable&quot;:88,&quot;orderDeck&quot;:243}," calcext:value-type="string">
            <text:p>{"id":"1-49","name":"巨大古墳","kana":"きょだいこふん","traitText":null,"ruleText":"自分のスタートフェイズが終了したとき、マリョク配置権+1する。","legacyText":"魔力化","imageUrl":"https://one-draw.jp/ijinden/cardlist/001/card/01_049.png","expansion":15,"rarity":1,"type":2,"level":2,"color":4,"term":0,"trait":0,"legacy":1,"orderTable":88,"orderDeck":243},</text:p>
          </table:table-cell>
          <table:table-cell table:number-columns-repeated="16347"/>
        </table:table-row>
        <table:table-row table:style-name="ro2">
          <table:table-cell office:value-type="float" office:value="89" calcext:value-type="float">
            <text:p>89</text:p>
          </table:table-cell>
          <table:table-cell office:value-type="float" office:value="252" calcext:value-type="float">
            <text:p>252</text:p>
          </table:table-cell>
          <table:table-cell office:value-type="string" calcext:value-type="string">
            <text:p>1-50</text:p>
          </table:table-cell>
          <table:table-cell office:value-type="float" office:value="50" calcext:value-type="float">
            <text:p>50</text:p>
          </table:table-cell>
          <table:table-cell office:value-type="string" calcext:value-type="string">
            <text:p>魔除けの社</text:p>
          </table:table-cell>
          <table:table-cell office:value-type="string" calcext:value-type="string">
            <text:p>まよけのやしろ</text:p>
          </table:table-cell>
          <table:table-cell office:value-type="string" calcext:value-type="string">
            <text:p>第１弾ブースターパック</text:p>
          </table:table-cell>
          <table:table-cell table:formula="of:=VLOOKUP([.G90];[$収録番号.$A$1:$収録番号.$B$9];2;0)" office:value-type="float" office:value="15" calcext:value-type="float">
            <text:p>15</text:p>
          </table:table-cell>
          <table:table-cell office:value-type="string" calcext:value-type="string">
            <text:p>N</text:p>
          </table:table-cell>
          <table:table-cell table:formula="of:=VLOOKUP([.I90];[$レアリティ番号.$A$1:$レアリティ番号.$B$4];2;0)" office:value-type="float" office:value="1" calcext:value-type="float">
            <text:p>1</text:p>
          </table:table-cell>
          <table:table-cell office:value-type="string" calcext:value-type="string">
            <text:p>ハイケイ</text:p>
          </table:table-cell>
          <table:table-cell table:formula="of:=VLOOKUP([.K90];[$種類番号.$A$1:$種類番号.$B$4];2;0)" office:value-type="float" office:value="2" calcext:value-type="float">
            <text:p>2</text:p>
          </table:table-cell>
          <table:table-cell office:value-type="string" calcext:value-type="string">
            <text:p>緑</text:p>
          </table:table-cell>
          <table:table-cell table:formula="of:=VLOOKUP([.M90];[$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9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0];[$特性番号.$A$1:$特性番号.$B$8];2;0);0)" office:value-type="float" office:value="0" calcext:value-type="float">
            <text:p>0</text:p>
          </table:table-cell>
          <table:table-cell office:value-type="string" calcext:value-type="string">
            <text:p>バトル解決に際し、自分の戦場のガーディアンがブロッカーに含まれているなら、パワー4000以下のアタッカーは破壊される。</text:p>
          </table:table-cell>
          <table:table-cell table:style-name="ce8" office:value-type="string" calcext:value-type="string">
            <text:p>魔力化</text:p>
          </table:table-cell>
          <table:table-cell table:formula="of:=IFERROR(VLOOKUP([.$V90];[$遺業能力番号.$A$1:$遺業能力番号.$B$9];2;0);0)" office:value-type="float" office:value="1" calcext:value-type="float">
            <text:p>1</text:p>
          </table:table-cell>
          <table:table-cell office:value-type="string" calcext:value-type="string">
            <text:p>https://one-draw.jp/ijinden/cardlist/001/card/01_050.png</text:p>
          </table:table-cell>
          <table:table-cell table:formula="of:=CONCATENATE([$JSON.$A$1];[.$C90];[$JSON.$B$1];[.$E90];[$JSON.$C$1];[.$F90];[$JSON.$D$1];IF(ISNA([.$S90]);&quot;null&quot;;&quot;&quot;&quot;&quot;&amp;[.$S90]&amp;&quot;&quot;&quot;&quot;);[$JSON.$E$1];[.$U90];[$JSON.$F$1];IF(ISNA([.$V90]);&quot;null&quot;;&quot;&quot;&quot;&quot;&amp;[.$V90]&amp;&quot;&quot;&quot;&quot;);[$JSON.$G$1];[.$X90];[$JSON.$H$1];[.$H90];[$JSON.$I$1];[.J90];[$JSON.$J$1];[.$L90];[$JSON.$K$1];[.$O90];[$JSON.$L$1];[.$N90];[$JSON.$M$1];[.$R90];[$JSON.$N$1];[.$T90];[$JSON.$O$1];[.$W90];[$JSON.$P$1];[.$A90];[$JSON.$Q$1];[.$B90];[$JSON.$R$1])" office:value-type="string" office:string-value="{&quot;id&quot;:&quot;1-50&quot;,&quot;name&quot;:&quot;魔除けの社&quot;,&quot;kana&quot;:&quot;まよけのやしろ&quot;,&quot;traitText&quot;:null,&quot;ruleText&quot;:&quot;バトル解決に際し、自分の戦場のガーディアンがブロッカーに含まれているなら、パワー4000以下のアタッカーは破壊される。&quot;,&quot;legacyText&quot;:&quot;魔力化&quot;,&quot;imageUrl&quot;:&quot;https://one-draw.jp/ijinden/cardlist/001/card/01_050.png&quot;,&quot;expansion&quot;:15,&quot;rarity&quot;:1,&quot;type&quot;:2,&quot;level&quot;:3,&quot;color&quot;:4,&quot;term&quot;:0,&quot;trait&quot;:0,&quot;legacy&quot;:1,&quot;orderTable&quot;:89,&quot;orderDeck&quot;:252}," calcext:value-type="string">
            <text:p>{"id":"1-50","name":"魔除けの社","kana":"まよけのやしろ","traitText":null,"ruleText":"バトル解決に際し、自分の戦場のガーディアンがブロッカーに含まれているなら、パワー4000以下のアタッカーは破壊される。","legacyText":"魔力化","imageUrl":"https://one-draw.jp/ijinden/cardlist/001/card/01_050.png","expansion":15,"rarity":1,"type":2,"level":3,"color":4,"term":0,"trait":0,"legacy":1,"orderTable":89,"orderDeck":252},</text:p>
          </table:table-cell>
          <table:table-cell table:number-columns-repeated="16347"/>
        </table:table-row>
        <table:table-row table:style-name="ro2">
          <table:table-cell office:value-type="float" office:value="90" calcext:value-type="float">
            <text:p>90</text:p>
          </table:table-cell>
          <table:table-cell office:value-type="float" office:value="269" calcext:value-type="float">
            <text:p>269</text:p>
          </table:table-cell>
          <table:table-cell office:value-type="string" calcext:value-type="string">
            <text:p>1-51</text:p>
          </table:table-cell>
          <table:table-cell office:value-type="float" office:value="51" calcext:value-type="float">
            <text:p>51</text:p>
          </table:table-cell>
          <table:table-cell office:value-type="string" calcext:value-type="string">
            <text:p>冨嶽三十六景</text:p>
          </table:table-cell>
          <table:table-cell office:value-type="string" calcext:value-type="string">
            <text:p>ふがくさんじゅうろっけい</text:p>
          </table:table-cell>
          <table:table-cell office:value-type="string" calcext:value-type="string">
            <text:p>第１弾ブースターパック</text:p>
          </table:table-cell>
          <table:table-cell table:formula="of:=VLOOKUP([.G91];[$収録番号.$A$1:$収録番号.$B$9];2;0)" office:value-type="float" office:value="15" calcext:value-type="float">
            <text:p>15</text:p>
          </table:table-cell>
          <table:table-cell office:value-type="string" calcext:value-type="string">
            <text:p>N</text:p>
          </table:table-cell>
          <table:table-cell table:formula="of:=VLOOKUP([.I91];[$レアリティ番号.$A$1:$レアリティ番号.$B$4];2;0)" office:value-type="float" office:value="1" calcext:value-type="float">
            <text:p>1</text:p>
          </table:table-cell>
          <table:table-cell office:value-type="string" calcext:value-type="string">
            <text:p>ハイケイ</text:p>
          </table:table-cell>
          <table:table-cell table:formula="of:=VLOOKUP([.K91];[$種類番号.$A$1:$種類番号.$B$4];2;0)" office:value-type="float" office:value="2" calcext:value-type="float">
            <text:p>2</text:p>
          </table:table-cell>
          <table:table-cell office:value-type="string" calcext:value-type="string">
            <text:p>緑</text:p>
          </table:table-cell>
          <table:table-cell table:formula="of:=VLOOKUP([.M91];[$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91];[$能力語番号.$A$1:$能力語番号.$B$10];2;0);0)" office:value-type="float" office:value="0" calcext:value-type="float">
            <text:p>0</text:p>
          </table:table-cell>
          <table:table-cell office:value-type="string" calcext:value-type="string">
            <text:p>美術</text:p>
          </table:table-cell>
          <table:table-cell table:formula="of:=IFERROR(VLOOKUP([.$S91];[$特性番号.$A$1:$特性番号.$B$8];2;0);0)" office:value-type="float" office:value="2" calcext:value-type="float">
            <text:p>2</text:p>
          </table:table-cell>
          <table:table-cell office:value-type="string" calcext:value-type="string">
            <text:p>自分のメインフェイズが開始したとき、遺業能力を持つ墓地のハイケイ1つを指定して発動できる。そのハイケイを戦場に置く。</text:p>
          </table:table-cell>
          <table:table-cell table:style-name="ce8" table:formula="of:=NA()" office:value-type="string" office:string-value="" calcext:value-type="error">
            <text:p>#N/A</text:p>
          </table:table-cell>
          <table:table-cell table:formula="of:=IFERROR(VLOOKUP([.$V91];[$遺業能力番号.$A$1:$遺業能力番号.$B$9];2;0);0)" office:value-type="float" office:value="0" calcext:value-type="float">
            <text:p>0</text:p>
          </table:table-cell>
          <table:table-cell office:value-type="string" calcext:value-type="string">
            <text:p>https://one-draw.jp/ijinden/cardlist/001/card/01_051.png</text:p>
          </table:table-cell>
          <table:table-cell table:formula="of:=CONCATENATE([$JSON.$A$1];[.$C91];[$JSON.$B$1];[.$E91];[$JSON.$C$1];[.$F91];[$JSON.$D$1];IF(ISNA([.$S91]);&quot;null&quot;;&quot;&quot;&quot;&quot;&amp;[.$S91]&amp;&quot;&quot;&quot;&quot;);[$JSON.$E$1];[.$U91];[$JSON.$F$1];IF(ISNA([.$V91]);&quot;null&quot;;&quot;&quot;&quot;&quot;&amp;[.$V91]&amp;&quot;&quot;&quot;&quot;);[$JSON.$G$1];[.$X91];[$JSON.$H$1];[.$H91];[$JSON.$I$1];[.J91];[$JSON.$J$1];[.$L91];[$JSON.$K$1];[.$O91];[$JSON.$L$1];[.$N91];[$JSON.$M$1];[.$R91];[$JSON.$N$1];[.$T91];[$JSON.$O$1];[.$W91];[$JSON.$P$1];[.$A91];[$JSON.$Q$1];[.$B91];[$JSON.$R$1])" office:value-type="string" office:string-value="{&quot;id&quot;:&quot;1-51&quot;,&quot;name&quot;:&quot;冨嶽三十六景&quot;,&quot;kana&quot;:&quot;ふがくさんじゅうろっけい&quot;,&quot;traitText&quot;:&quot;美術&quot;,&quot;ruleText&quot;:&quot;自分のメインフェイズが開始したとき、遺業能力を持つ墓地のハイケイ1つを指定して発動できる。そのハイケイを戦場に置く。&quot;,&quot;legacyText&quot;:null,&quot;imageUrl&quot;:&quot;https://one-draw.jp/ijinden/cardlist/001/card/01_051.png&quot;,&quot;expansion&quot;:15,&quot;rarity&quot;:1,&quot;type&quot;:2,&quot;level&quot;:5,&quot;color&quot;:4,&quot;term&quot;:0,&quot;trait&quot;:2,&quot;legacy&quot;:0,&quot;orderTable&quot;:90,&quot;orderDeck&quot;:269}," calcext:value-type="string">
            <text:p>{"id":"1-51","name":"冨嶽三十六景","kana":"ふがくさんじゅうろっけい","traitText":"美術","ruleText":"自分のメインフェイズが開始したとき、遺業能力を持つ墓地のハイケイ1つを指定して発動できる。そのハイケイを戦場に置く。","legacyText":null,"imageUrl":"https://one-draw.jp/ijinden/cardlist/001/card/01_051.png","expansion":15,"rarity":1,"type":2,"level":5,"color":4,"term":0,"trait":2,"legacy":0,"orderTable":90,"orderDeck":269},</text:p>
          </table:table-cell>
          <table:table-cell table:number-columns-repeated="16347"/>
        </table:table-row>
        <table:table-row table:style-name="ro2">
          <table:table-cell office:value-type="float" office:value="91" calcext:value-type="float">
            <text:p>91</text:p>
          </table:table-cell>
          <table:table-cell office:value-type="float" office:value="303" calcext:value-type="float">
            <text:p>303</text:p>
          </table:table-cell>
          <table:table-cell office:value-type="string" calcext:value-type="string">
            <text:p>1-52</text:p>
          </table:table-cell>
          <table:table-cell office:value-type="float" office:value="52" calcext:value-type="float">
            <text:p>52</text:p>
          </table:table-cell>
          <table:table-cell office:value-type="string" calcext:value-type="string">
            <text:p>バレット</text:p>
          </table:table-cell>
          <table:table-cell office:value-type="string" calcext:value-type="string">
            <text:p>ばれっと</text:p>
          </table:table-cell>
          <table:table-cell office:value-type="string" calcext:value-type="string">
            <text:p>第１弾ブースターパック</text:p>
          </table:table-cell>
          <table:table-cell table:formula="of:=VLOOKUP([.G92];[$収録番号.$A$1:$収録番号.$B$9];2;0)" office:value-type="float" office:value="15" calcext:value-type="float">
            <text:p>15</text:p>
          </table:table-cell>
          <table:table-cell office:value-type="string" calcext:value-type="string">
            <text:p>N</text:p>
          </table:table-cell>
          <table:table-cell table:formula="of:=VLOOKUP([.I92];[$レアリティ番号.$A$1:$レアリティ番号.$B$4];2;0)" office:value-type="float" office:value="1" calcext:value-type="float">
            <text:p>1</text:p>
          </table:table-cell>
          <table:table-cell office:value-type="string" calcext:value-type="string">
            <text:p>マホウ</text:p>
          </table:table-cell>
          <table:table-cell table:formula="of:=VLOOKUP([.K92];[$種類番号.$A$1:$種類番号.$B$4];2;0)" office:value-type="float" office:value="3" calcext:value-type="float">
            <text:p>3</text:p>
          </table:table-cell>
          <table:table-cell office:value-type="string" calcext:value-type="string">
            <text:p>赤</text:p>
          </table:table-cell>
          <table:table-cell table:formula="of:=VLOOKUP([.M92];[$色番号.$A$1:$色番号.$B$10];2;0)"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9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2];[$特性番号.$A$1:$特性番号.$B$8];2;0);0)" office:value-type="float" office:value="0" calcext:value-type="float">
            <text:p>0</text:p>
          </table:table-cell>
          <table:table-cell office:value-type="string" calcext:value-type="string">
            <text:p>自分の戦場のイジン1体と相手の戦場のイジン1体を指定して発動できる。それらのイジンすべてを破壊する。</text:p>
          </table:table-cell>
          <table:table-cell table:style-name="ce8" office:value-type="string" calcext:value-type="string">
            <text:p>冥府発動</text:p>
          </table:table-cell>
          <table:table-cell table:formula="of:=IFERROR(VLOOKUP([.$V92];[$遺業能力番号.$A$1:$遺業能力番号.$B$9];2;0);0)" office:value-type="float" office:value="2" calcext:value-type="float">
            <text:p>2</text:p>
          </table:table-cell>
          <table:table-cell office:value-type="string" calcext:value-type="string">
            <text:p>https://one-draw.jp/ijinden/cardlist/001/card/01_052.png</text:p>
          </table:table-cell>
          <table:table-cell table:formula="of:=CONCATENATE([$JSON.$A$1];[.$C92];[$JSON.$B$1];[.$E92];[$JSON.$C$1];[.$F92];[$JSON.$D$1];IF(ISNA([.$S92]);&quot;null&quot;;&quot;&quot;&quot;&quot;&amp;[.$S92]&amp;&quot;&quot;&quot;&quot;);[$JSON.$E$1];[.$U92];[$JSON.$F$1];IF(ISNA([.$V92]);&quot;null&quot;;&quot;&quot;&quot;&quot;&amp;[.$V92]&amp;&quot;&quot;&quot;&quot;);[$JSON.$G$1];[.$X92];[$JSON.$H$1];[.$H92];[$JSON.$I$1];[.J92];[$JSON.$J$1];[.$L92];[$JSON.$K$1];[.$O92];[$JSON.$L$1];[.$N92];[$JSON.$M$1];[.$R92];[$JSON.$N$1];[.$T92];[$JSON.$O$1];[.$W92];[$JSON.$P$1];[.$A92];[$JSON.$Q$1];[.$B92];[$JSON.$R$1])" office:value-type="string" office:string-value="{&quot;id&quot;:&quot;1-52&quot;,&quot;name&quot;:&quot;バレット&quot;,&quot;kana&quot;:&quot;ばれっと&quot;,&quot;traitText&quot;:null,&quot;ruleText&quot;:&quot;自分の戦場のイジン1体と相手の戦場のイジン1体を指定して発動できる。それらのイジンすべてを破壊する。&quot;,&quot;legacyText&quot;:&quot;冥府発動&quot;,&quot;imageUrl&quot;:&quot;https://one-draw.jp/ijinden/cardlist/001/card/01_052.png&quot;,&quot;expansion&quot;:15,&quot;rarity&quot;:1,&quot;type&quot;:3,&quot;level&quot;:3,&quot;color&quot;:1,&quot;term&quot;:0,&quot;trait&quot;:0,&quot;legacy&quot;:2,&quot;orderTable&quot;:91,&quot;orderDeck&quot;:303}," calcext:value-type="string">
            <text:p>{"id":"1-52","name":"バレット","kana":"ばれっと","traitText":null,"ruleText":"自分の戦場のイジン1体と相手の戦場のイジン1体を指定して発動できる。それらのイジンすべてを破壊する。","legacyText":"冥府発動","imageUrl":"https://one-draw.jp/ijinden/cardlist/001/card/01_052.png","expansion":15,"rarity":1,"type":3,"level":3,"color":1,"term":0,"trait":0,"legacy":2,"orderTable":91,"orderDeck":303},</text:p>
          </table:table-cell>
          <table:table-cell table:number-columns-repeated="16347"/>
        </table:table-row>
        <table:table-row table:style-name="ro2">
          <table:table-cell office:value-type="float" office:value="92" calcext:value-type="float">
            <text:p>92</text:p>
          </table:table-cell>
          <table:table-cell office:value-type="float" office:value="318" calcext:value-type="float">
            <text:p>318</text:p>
          </table:table-cell>
          <table:table-cell office:value-type="string" calcext:value-type="string">
            <text:p>1-53</text:p>
          </table:table-cell>
          <table:table-cell office:value-type="float" office:value="53" calcext:value-type="float">
            <text:p>53</text:p>
          </table:table-cell>
          <table:table-cell office:value-type="string" calcext:value-type="string">
            <text:p>チャンピオン</text:p>
          </table:table-cell>
          <table:table-cell office:value-type="string" calcext:value-type="string">
            <text:p>ちゃんぴおん</text:p>
          </table:table-cell>
          <table:table-cell office:value-type="string" calcext:value-type="string">
            <text:p>第１弾ブースターパック</text:p>
          </table:table-cell>
          <table:table-cell table:formula="of:=VLOOKUP([.G93];[$収録番号.$A$1:$収録番号.$B$9];2;0)" office:value-type="float" office:value="15" calcext:value-type="float">
            <text:p>15</text:p>
          </table:table-cell>
          <table:table-cell office:value-type="string" calcext:value-type="string">
            <text:p>R</text:p>
          </table:table-cell>
          <table:table-cell table:formula="of:=VLOOKUP([.I93];[$レアリティ番号.$A$1:$レアリティ番号.$B$4];2;0)" office:value-type="float" office:value="2" calcext:value-type="float">
            <text:p>2</text:p>
          </table:table-cell>
          <table:table-cell office:value-type="string" calcext:value-type="string">
            <text:p>マホウ</text:p>
          </table:table-cell>
          <table:table-cell table:formula="of:=VLOOKUP([.K93];[$種類番号.$A$1:$種類番号.$B$4];2;0)" office:value-type="float" office:value="3" calcext:value-type="float">
            <text:p>3</text:p>
          </table:table-cell>
          <table:table-cell office:value-type="string" calcext:value-type="string">
            <text:p>赤</text:p>
          </table:table-cell>
          <table:table-cell table:formula="of:=VLOOKUP([.M93];[$色番号.$A$1:$色番号.$B$10];2;0)"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Q9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3];[$特性番号.$A$1:$特性番号.$B$8];2;0);0)" office:value-type="float" office:value="0" calcext:value-type="float">
            <text:p>0</text:p>
          </table:table-cell>
          <table:table-cell office:value-type="string" calcext:value-type="string">
            <text:p>自分の戦場のイジン1体を指定して発動できる。そのイジンは、このターンの間「イジンにブロックされない」を得る。</text:p>
          </table:table-cell>
          <table:table-cell table:style-name="ce8" table:formula="of:=NA()" office:value-type="string" office:string-value="" calcext:value-type="error">
            <text:p>#N/A</text:p>
          </table:table-cell>
          <table:table-cell table:formula="of:=IFERROR(VLOOKUP([.$V93];[$遺業能力番号.$A$1:$遺業能力番号.$B$9];2;0);0)" office:value-type="float" office:value="0" calcext:value-type="float">
            <text:p>0</text:p>
          </table:table-cell>
          <table:table-cell office:value-type="string" calcext:value-type="string">
            <text:p>https://one-draw.jp/ijinden/cardlist/001/card/01_053.png</text:p>
          </table:table-cell>
          <table:table-cell table:formula="of:=CONCATENATE([$JSON.$A$1];[.$C93];[$JSON.$B$1];[.$E93];[$JSON.$C$1];[.$F93];[$JSON.$D$1];IF(ISNA([.$S93]);&quot;null&quot;;&quot;&quot;&quot;&quot;&amp;[.$S93]&amp;&quot;&quot;&quot;&quot;);[$JSON.$E$1];[.$U93];[$JSON.$F$1];IF(ISNA([.$V93]);&quot;null&quot;;&quot;&quot;&quot;&quot;&amp;[.$V93]&amp;&quot;&quot;&quot;&quot;);[$JSON.$G$1];[.$X93];[$JSON.$H$1];[.$H93];[$JSON.$I$1];[.J93];[$JSON.$J$1];[.$L93];[$JSON.$K$1];[.$O93];[$JSON.$L$1];[.$N93];[$JSON.$M$1];[.$R93];[$JSON.$N$1];[.$T93];[$JSON.$O$1];[.$W93];[$JSON.$P$1];[.$A93];[$JSON.$Q$1];[.$B93];[$JSON.$R$1])" office:value-type="string" office:string-value="{&quot;id&quot;:&quot;1-53&quot;,&quot;name&quot;:&quot;チャンピオン&quot;,&quot;kana&quot;:&quot;ちゃんぴおん&quot;,&quot;traitText&quot;:null,&quot;ruleText&quot;:&quot;自分の戦場のイジン1体を指定して発動できる。そのイジンは、このターンの間「イジンにブロックされない」を得る。&quot;,&quot;legacyText&quot;:null,&quot;imageUrl&quot;:&quot;https://one-draw.jp/ijinden/cardlist/001/card/01_053.png&quot;,&quot;expansion&quot;:15,&quot;rarity&quot;:2,&quot;type&quot;:3,&quot;level&quot;:4,&quot;color&quot;:1,&quot;term&quot;:0,&quot;trait&quot;:0,&quot;legacy&quot;:0,&quot;orderTable&quot;:92,&quot;orderDeck&quot;:318}," calcext:value-type="string">
            <text:p>{"id":"1-53","name":"チャンピオン","kana":"ちゃんぴおん","traitText":null,"ruleText":"自分の戦場のイジン1体を指定して発動できる。そのイジンは、このターンの間「イジンにブロックされない」を得る。","legacyText":null,"imageUrl":"https://one-draw.jp/ijinden/cardlist/001/card/01_053.png","expansion":15,"rarity":2,"type":3,"level":4,"color":1,"term":0,"trait":0,"legacy":0,"orderTable":92,"orderDeck":318},</text:p>
          </table:table-cell>
          <table:table-cell table:number-columns-repeated="16347"/>
        </table:table-row>
        <table:table-row table:style-name="ro2">
          <table:table-cell office:value-type="float" office:value="93" calcext:value-type="float">
            <text:p>93</text:p>
          </table:table-cell>
          <table:table-cell office:value-type="float" office:value="332" calcext:value-type="float">
            <text:p>332</text:p>
          </table:table-cell>
          <table:table-cell office:value-type="string" calcext:value-type="string">
            <text:p>1-54</text:p>
          </table:table-cell>
          <table:table-cell office:value-type="float" office:value="54" calcext:value-type="float">
            <text:p>54</text:p>
          </table:table-cell>
          <table:table-cell office:value-type="string" calcext:value-type="string">
            <text:p>ファイナルアタック</text:p>
          </table:table-cell>
          <table:table-cell office:value-type="string" calcext:value-type="string">
            <text:p>ふぁいなるあたっく</text:p>
          </table:table-cell>
          <table:table-cell office:value-type="string" calcext:value-type="string">
            <text:p>第１弾ブースターパック</text:p>
          </table:table-cell>
          <table:table-cell table:formula="of:=VLOOKUP([.G94];[$収録番号.$A$1:$収録番号.$B$9];2;0)" office:value-type="float" office:value="15" calcext:value-type="float">
            <text:p>15</text:p>
          </table:table-cell>
          <table:table-cell office:value-type="string" calcext:value-type="string">
            <text:p>N</text:p>
          </table:table-cell>
          <table:table-cell table:formula="of:=VLOOKUP([.I94];[$レアリティ番号.$A$1:$レアリティ番号.$B$4];2;0)" office:value-type="float" office:value="1" calcext:value-type="float">
            <text:p>1</text:p>
          </table:table-cell>
          <table:table-cell office:value-type="string" calcext:value-type="string">
            <text:p>マホウ</text:p>
          </table:table-cell>
          <table:table-cell table:formula="of:=VLOOKUP([.K94];[$種類番号.$A$1:$種類番号.$B$4];2;0)" office:value-type="float" office:value="3" calcext:value-type="float">
            <text:p>3</text:p>
          </table:table-cell>
          <table:table-cell office:value-type="string" calcext:value-type="string">
            <text:p>赤</text:p>
          </table:table-cell>
          <table:table-cell table:formula="of:=VLOOKUP([.M94];[$色番号.$A$1:$色番号.$B$10];2;0)"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formula="of:=NA()" office:value-type="string" office:string-value="" calcext:value-type="error">
            <text:p>#N/A</text:p>
          </table:table-cell>
          <table:table-cell table:formula="of:=IFERROR(VLOOKUP([.$Q9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4];[$特性番号.$A$1:$特性番号.$B$8];2;0);0)" office:value-type="float" office:value="0" calcext:value-type="float">
            <text:p>0</text:p>
          </table:table-cell>
          <table:table-cell office:value-type="string" calcext:value-type="string">
            <text:p>次のエンドフェイズが開始したとき、ゲームに敗北する。¶自分の戦場のイジンすべてを起こして、追加でバトルする。</text:p>
          </table:table-cell>
          <table:table-cell table:style-name="ce8" table:formula="of:=NA()" office:value-type="string" office:string-value="" calcext:value-type="error">
            <text:p>#N/A</text:p>
          </table:table-cell>
          <table:table-cell table:formula="of:=IFERROR(VLOOKUP([.$V94];[$遺業能力番号.$A$1:$遺業能力番号.$B$9];2;0);0)" office:value-type="float" office:value="0" calcext:value-type="float">
            <text:p>0</text:p>
          </table:table-cell>
          <table:table-cell office:value-type="string" calcext:value-type="string">
            <text:p>https://one-draw.jp/ijinden/cardlist/001/card/01_054.png</text:p>
          </table:table-cell>
          <table:table-cell table:formula="of:=CONCATENATE([$JSON.$A$1];[.$C94];[$JSON.$B$1];[.$E94];[$JSON.$C$1];[.$F94];[$JSON.$D$1];IF(ISNA([.$S94]);&quot;null&quot;;&quot;&quot;&quot;&quot;&amp;[.$S94]&amp;&quot;&quot;&quot;&quot;);[$JSON.$E$1];[.$U94];[$JSON.$F$1];IF(ISNA([.$V94]);&quot;null&quot;;&quot;&quot;&quot;&quot;&amp;[.$V94]&amp;&quot;&quot;&quot;&quot;);[$JSON.$G$1];[.$X94];[$JSON.$H$1];[.$H94];[$JSON.$I$1];[.J94];[$JSON.$J$1];[.$L94];[$JSON.$K$1];[.$O94];[$JSON.$L$1];[.$N94];[$JSON.$M$1];[.$R94];[$JSON.$N$1];[.$T94];[$JSON.$O$1];[.$W94];[$JSON.$P$1];[.$A94];[$JSON.$Q$1];[.$B94];[$JSON.$R$1])" office:value-type="string" office:string-value="{&quot;id&quot;:&quot;1-54&quot;,&quot;name&quot;:&quot;ファイナルアタック&quot;,&quot;kana&quot;:&quot;ふぁいなるあたっく&quot;,&quot;traitText&quot;:null,&quot;ruleText&quot;:&quot;次のエンドフェイズが開始したとき、ゲームに敗北する。¶自分の戦場のイジンすべてを起こして、追加でバトルする。&quot;,&quot;legacyText&quot;:null,&quot;imageUrl&quot;:&quot;https://one-draw.jp/ijinden/cardlist/001/card/01_054.png&quot;,&quot;expansion&quot;:15,&quot;rarity&quot;:1,&quot;type&quot;:3,&quot;level&quot;:6,&quot;color&quot;:1,&quot;term&quot;:0,&quot;trait&quot;:0,&quot;legacy&quot;:0,&quot;orderTable&quot;:93,&quot;orderDeck&quot;:332}," calcext:value-type="string">
            <text:p>{"id":"1-54","name":"ファイナルアタック","kana":"ふぁいなるあたっく","traitText":null,"ruleText":"次のエンドフェイズが開始したとき、ゲームに敗北する。¶自分の戦場のイジンすべてを起こして、追加でバトルする。","legacyText":null,"imageUrl":"https://one-draw.jp/ijinden/cardlist/001/card/01_054.png","expansion":15,"rarity":1,"type":3,"level":6,"color":1,"term":0,"trait":0,"legacy":0,"orderTable":93,"orderDeck":332},</text:p>
          </table:table-cell>
          <table:table-cell table:number-columns-repeated="16347"/>
        </table:table-row>
        <table:table-row table:style-name="ro2">
          <table:table-cell office:value-type="float" office:value="94" calcext:value-type="float">
            <text:p>94</text:p>
          </table:table-cell>
          <table:table-cell office:value-type="float" office:value="294" calcext:value-type="float">
            <text:p>294</text:p>
          </table:table-cell>
          <table:table-cell office:value-type="string" calcext:value-type="string">
            <text:p>1-55</text:p>
          </table:table-cell>
          <table:table-cell office:value-type="float" office:value="55" calcext:value-type="float">
            <text:p>55</text:p>
          </table:table-cell>
          <table:table-cell office:value-type="string" calcext:value-type="string">
            <text:p>ストーム</text:p>
          </table:table-cell>
          <table:table-cell office:value-type="string" calcext:value-type="string">
            <text:p>すとーむ</text:p>
          </table:table-cell>
          <table:table-cell office:value-type="string" calcext:value-type="string">
            <text:p>第１弾ブースターパック</text:p>
          </table:table-cell>
          <table:table-cell table:formula="of:=VLOOKUP([.G95];[$収録番号.$A$1:$収録番号.$B$9];2;0)" office:value-type="float" office:value="15" calcext:value-type="float">
            <text:p>15</text:p>
          </table:table-cell>
          <table:table-cell office:value-type="string" calcext:value-type="string">
            <text:p>N</text:p>
          </table:table-cell>
          <table:table-cell table:formula="of:=VLOOKUP([.I95];[$レアリティ番号.$A$1:$レアリティ番号.$B$4];2;0)" office:value-type="float" office:value="1" calcext:value-type="float">
            <text:p>1</text:p>
          </table:table-cell>
          <table:table-cell office:value-type="string" calcext:value-type="string">
            <text:p>マホウ</text:p>
          </table:table-cell>
          <table:table-cell table:formula="of:=VLOOKUP([.K95];[$種類番号.$A$1:$種類番号.$B$4];2;0)" office:value-type="float" office:value="3" calcext:value-type="float">
            <text:p>3</text:p>
          </table:table-cell>
          <table:table-cell office:value-type="string" calcext:value-type="string">
            <text:p>青</text:p>
          </table:table-cell>
          <table:table-cell table:formula="of:=VLOOKUP([.M95];[$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9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5];[$特性番号.$A$1:$特性番号.$B$8];2;0);0)" office:value-type="float" office:value="0" calcext:value-type="float">
            <text:p>0</text:p>
          </table:table-cell>
          <table:table-cell office:value-type="string" calcext:value-type="string">
            <text:p>戦場のイジン1体を指定して発動できる。そのイジンを手札に戻す。</text:p>
          </table:table-cell>
          <table:table-cell table:style-name="ce8" office:value-type="string" calcext:value-type="string">
            <text:p>冥府発動</text:p>
          </table:table-cell>
          <table:table-cell table:formula="of:=IFERROR(VLOOKUP([.$V95];[$遺業能力番号.$A$1:$遺業能力番号.$B$9];2;0);0)" office:value-type="float" office:value="2" calcext:value-type="float">
            <text:p>2</text:p>
          </table:table-cell>
          <table:table-cell office:value-type="string" calcext:value-type="string">
            <text:p>https://one-draw.jp/ijinden/cardlist/001/card/01_055.png</text:p>
          </table:table-cell>
          <table:table-cell table:formula="of:=CONCATENATE([$JSON.$A$1];[.$C95];[$JSON.$B$1];[.$E95];[$JSON.$C$1];[.$F95];[$JSON.$D$1];IF(ISNA([.$S95]);&quot;null&quot;;&quot;&quot;&quot;&quot;&amp;[.$S95]&amp;&quot;&quot;&quot;&quot;);[$JSON.$E$1];[.$U95];[$JSON.$F$1];IF(ISNA([.$V95]);&quot;null&quot;;&quot;&quot;&quot;&quot;&amp;[.$V95]&amp;&quot;&quot;&quot;&quot;);[$JSON.$G$1];[.$X95];[$JSON.$H$1];[.$H95];[$JSON.$I$1];[.J95];[$JSON.$J$1];[.$L95];[$JSON.$K$1];[.$O95];[$JSON.$L$1];[.$N95];[$JSON.$M$1];[.$R95];[$JSON.$N$1];[.$T95];[$JSON.$O$1];[.$W95];[$JSON.$P$1];[.$A95];[$JSON.$Q$1];[.$B95];[$JSON.$R$1])" office:value-type="string" office:string-value="{&quot;id&quot;:&quot;1-55&quot;,&quot;name&quot;:&quot;ストーム&quot;,&quot;kana&quot;:&quot;すとーむ&quot;,&quot;traitText&quot;:null,&quot;ruleText&quot;:&quot;戦場のイジン1体を指定して発動できる。そのイジンを手札に戻す。&quot;,&quot;legacyText&quot;:&quot;冥府発動&quot;,&quot;imageUrl&quot;:&quot;https://one-draw.jp/ijinden/cardlist/001/card/01_055.png&quot;,&quot;expansion&quot;:15,&quot;rarity&quot;:1,&quot;type&quot;:3,&quot;level&quot;:2,&quot;color&quot;:2,&quot;term&quot;:0,&quot;trait&quot;:0,&quot;legacy&quot;:2,&quot;orderTable&quot;:94,&quot;orderDeck&quot;:294}," calcext:value-type="string">
            <text:p>{"id":"1-55","name":"ストーム","kana":"すとーむ","traitText":null,"ruleText":"戦場のイジン1体を指定して発動できる。そのイジンを手札に戻す。","legacyText":"冥府発動","imageUrl":"https://one-draw.jp/ijinden/cardlist/001/card/01_055.png","expansion":15,"rarity":1,"type":3,"level":2,"color":2,"term":0,"trait":0,"legacy":2,"orderTable":94,"orderDeck":294},</text:p>
          </table:table-cell>
          <table:table-cell table:number-columns-repeated="16347"/>
        </table:table-row>
        <table:table-row table:style-name="ro2">
          <table:table-cell office:value-type="float" office:value="95" calcext:value-type="float">
            <text:p>95</text:p>
          </table:table-cell>
          <table:table-cell office:value-type="float" office:value="319" calcext:value-type="float">
            <text:p>319</text:p>
          </table:table-cell>
          <table:table-cell office:value-type="string" calcext:value-type="string">
            <text:p>1-56</text:p>
          </table:table-cell>
          <table:table-cell office:value-type="float" office:value="56" calcext:value-type="float">
            <text:p>56</text:p>
          </table:table-cell>
          <table:table-cell office:value-type="string" calcext:value-type="string">
            <text:p>リバイバル</text:p>
          </table:table-cell>
          <table:table-cell office:value-type="string" calcext:value-type="string">
            <text:p>りばいばる</text:p>
          </table:table-cell>
          <table:table-cell office:value-type="string" calcext:value-type="string">
            <text:p>第１弾ブースターパック</text:p>
          </table:table-cell>
          <table:table-cell table:formula="of:=VLOOKUP([.G96];[$収録番号.$A$1:$収録番号.$B$9];2;0)" office:value-type="float" office:value="15" calcext:value-type="float">
            <text:p>15</text:p>
          </table:table-cell>
          <table:table-cell office:value-type="string" calcext:value-type="string">
            <text:p>R</text:p>
          </table:table-cell>
          <table:table-cell table:formula="of:=VLOOKUP([.I96];[$レアリティ番号.$A$1:$レアリティ番号.$B$4];2;0)" office:value-type="float" office:value="2" calcext:value-type="float">
            <text:p>2</text:p>
          </table:table-cell>
          <table:table-cell office:value-type="string" calcext:value-type="string">
            <text:p>マホウ</text:p>
          </table:table-cell>
          <table:table-cell table:formula="of:=VLOOKUP([.K96];[$種類番号.$A$1:$種類番号.$B$4];2;0)" office:value-type="float" office:value="3" calcext:value-type="float">
            <text:p>3</text:p>
          </table:table-cell>
          <table:table-cell office:value-type="string" calcext:value-type="string">
            <text:p>青</text:p>
          </table:table-cell>
          <table:table-cell table:formula="of:=VLOOKUP([.M96];[$色番号.$A$1:$色番号.$B$10];2;0)"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9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6];[$特性番号.$A$1:$特性番号.$B$8];2;0);0)" office:value-type="float" office:value="0" calcext:value-type="float">
            <text:p>0</text:p>
          </table:table-cell>
          <table:table-cell office:value-type="string" calcext:value-type="string">
            <text:p>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text:p>
          </table:table-cell>
          <table:table-cell table:style-name="ce8" office:value-type="string" calcext:value-type="string">
            <text:p>冥府発動</text:p>
          </table:table-cell>
          <table:table-cell table:formula="of:=IFERROR(VLOOKUP([.$V96];[$遺業能力番号.$A$1:$遺業能力番号.$B$9];2;0);0)" office:value-type="float" office:value="2" calcext:value-type="float">
            <text:p>2</text:p>
          </table:table-cell>
          <table:table-cell office:value-type="string" calcext:value-type="string">
            <text:p>https://one-draw.jp/ijinden/cardlist/001/card/01_056.png</text:p>
          </table:table-cell>
          <table:table-cell table:formula="of:=CONCATENATE([$JSON.$A$1];[.$C96];[$JSON.$B$1];[.$E96];[$JSON.$C$1];[.$F96];[$JSON.$D$1];IF(ISNA([.$S96]);&quot;null&quot;;&quot;&quot;&quot;&quot;&amp;[.$S96]&amp;&quot;&quot;&quot;&quot;);[$JSON.$E$1];[.$U96];[$JSON.$F$1];IF(ISNA([.$V96]);&quot;null&quot;;&quot;&quot;&quot;&quot;&amp;[.$V96]&amp;&quot;&quot;&quot;&quot;);[$JSON.$G$1];[.$X96];[$JSON.$H$1];[.$H96];[$JSON.$I$1];[.J96];[$JSON.$J$1];[.$L96];[$JSON.$K$1];[.$O96];[$JSON.$L$1];[.$N96];[$JSON.$M$1];[.$R96];[$JSON.$N$1];[.$T96];[$JSON.$O$1];[.$W96];[$JSON.$P$1];[.$A96];[$JSON.$Q$1];[.$B96];[$JSON.$R$1])" office:value-type="string" office:string-value="{&quot;id&quot;:&quot;1-56&quot;,&quot;name&quot;:&quot;リバイバル&quot;,&quot;kana&quot;:&quot;りばいばる&quot;,&quot;traitText&quot;:null,&quot;ruleText&quot;:&quot;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quot;,&quot;legacyText&quot;:&quot;冥府発動&quot;,&quot;imageUrl&quot;:&quot;https://one-draw.jp/ijinden/cardlist/001/card/01_056.png&quot;,&quot;expansion&quot;:15,&quot;rarity&quot;:2,&quot;type&quot;:3,&quot;level&quot;:4,&quot;color&quot;:2,&quot;term&quot;:0,&quot;trait&quot;:0,&quot;legacy&quot;:2,&quot;orderTable&quot;:95,&quot;orderDeck&quot;:319}," calcext:value-type="string">
            <text:p>{"id":"1-56","name":"リバイバル","kana":"りばいばる","traitText":null,"ruleText":"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legacyText":"冥府発動","imageUrl":"https://one-draw.jp/ijinden/cardlist/001/card/01_056.png","expansion":15,"rarity":2,"type":3,"level":4,"color":2,"term":0,"trait":0,"legacy":2,"orderTable":95,"orderDeck":319},</text:p>
          </table:table-cell>
          <table:table-cell table:number-columns-repeated="16347"/>
        </table:table-row>
        <table:table-row table:style-name="ro2">
          <table:table-cell office:value-type="float" office:value="96" calcext:value-type="float">
            <text:p>96</text:p>
          </table:table-cell>
          <table:table-cell office:value-type="float" office:value="321" calcext:value-type="float">
            <text:p>321</text:p>
          </table:table-cell>
          <table:table-cell office:value-type="string" calcext:value-type="string">
            <text:p>1-57</text:p>
          </table:table-cell>
          <table:table-cell office:value-type="float" office:value="57" calcext:value-type="float">
            <text:p>57</text:p>
          </table:table-cell>
          <table:table-cell office:value-type="string" calcext:value-type="string">
            <text:p>エイジング</text:p>
          </table:table-cell>
          <table:table-cell office:value-type="string" calcext:value-type="string">
            <text:p>えいじんぐ</text:p>
          </table:table-cell>
          <table:table-cell office:value-type="string" calcext:value-type="string">
            <text:p>第１弾ブースターパック</text:p>
          </table:table-cell>
          <table:table-cell table:formula="of:=VLOOKUP([.G97];[$収録番号.$A$1:$収録番号.$B$9];2;0)" office:value-type="float" office:value="15" calcext:value-type="float">
            <text:p>15</text:p>
          </table:table-cell>
          <table:table-cell office:value-type="string" calcext:value-type="string">
            <text:p>R</text:p>
          </table:table-cell>
          <table:table-cell table:formula="of:=VLOOKUP([.I97];[$レアリティ番号.$A$1:$レアリティ番号.$B$4];2;0)" office:value-type="float" office:value="2" calcext:value-type="float">
            <text:p>2</text:p>
          </table:table-cell>
          <table:table-cell office:value-type="string" calcext:value-type="string">
            <text:p>マホウ</text:p>
          </table:table-cell>
          <table:table-cell table:formula="of:=VLOOKUP([.K97];[$種類番号.$A$1:$種類番号.$B$4];2;0)" office:value-type="float" office:value="3" calcext:value-type="float">
            <text:p>3</text:p>
          </table:table-cell>
          <table:table-cell office:value-type="string" calcext:value-type="string">
            <text:p>緑</text:p>
          </table:table-cell>
          <table:table-cell table:formula="of:=VLOOKUP([.M97];[$色番号.$A$1:$色番号.$B$10];2;0)" office:value-type="float" office:value="4" calcext:value-type="float">
            <text:p>4</text:p>
          </table:table-cell>
          <table:table-cell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Q9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7];[$特性番号.$A$1:$特性番号.$B$8];2;0);0)" office:value-type="float" office:value="0" calcext:value-type="float">
            <text:p>0</text:p>
          </table:table-cell>
          <table:table-cell office:value-type="string" calcext:value-type="string">
            <text:p>相手の戦場のイジン1体を指定して発動できる。そのイジンを裏にして魔力ゾーンに置く。</text:p>
          </table:table-cell>
          <table:table-cell table:style-name="ce8" office:value-type="string" calcext:value-type="string">
            <text:p>冥府発動</text:p>
          </table:table-cell>
          <table:table-cell table:formula="of:=IFERROR(VLOOKUP([.$V97];[$遺業能力番号.$A$1:$遺業能力番号.$B$9];2;0);0)" office:value-type="float" office:value="2" calcext:value-type="float">
            <text:p>2</text:p>
          </table:table-cell>
          <table:table-cell office:value-type="string" calcext:value-type="string">
            <text:p>https://one-draw.jp/ijinden/cardlist/001/card/01_057.png</text:p>
          </table:table-cell>
          <table:table-cell table:formula="of:=CONCATENATE([$JSON.$A$1];[.$C97];[$JSON.$B$1];[.$E97];[$JSON.$C$1];[.$F97];[$JSON.$D$1];IF(ISNA([.$S97]);&quot;null&quot;;&quot;&quot;&quot;&quot;&amp;[.$S97]&amp;&quot;&quot;&quot;&quot;);[$JSON.$E$1];[.$U97];[$JSON.$F$1];IF(ISNA([.$V97]);&quot;null&quot;;&quot;&quot;&quot;&quot;&amp;[.$V97]&amp;&quot;&quot;&quot;&quot;);[$JSON.$G$1];[.$X97];[$JSON.$H$1];[.$H97];[$JSON.$I$1];[.J97];[$JSON.$J$1];[.$L97];[$JSON.$K$1];[.$O97];[$JSON.$L$1];[.$N97];[$JSON.$M$1];[.$R97];[$JSON.$N$1];[.$T97];[$JSON.$O$1];[.$W97];[$JSON.$P$1];[.$A97];[$JSON.$Q$1];[.$B97];[$JSON.$R$1])" office:value-type="string" office:string-value="{&quot;id&quot;:&quot;1-57&quot;,&quot;name&quot;:&quot;エイジング&quot;,&quot;kana&quot;:&quot;えいじんぐ&quot;,&quot;traitText&quot;:null,&quot;ruleText&quot;:&quot;相手の戦場のイジン1体を指定して発動できる。そのイジンを裏にして魔力ゾーンに置く。&quot;,&quot;legacyText&quot;:&quot;冥府発動&quot;,&quot;imageUrl&quot;:&quot;https://one-draw.jp/ijinden/cardlist/001/card/01_057.png&quot;,&quot;expansion&quot;:15,&quot;rarity&quot;:2,&quot;type&quot;:3,&quot;level&quot;:4,&quot;color&quot;:4,&quot;term&quot;:0,&quot;trait&quot;:0,&quot;legacy&quot;:2,&quot;orderTable&quot;:96,&quot;orderDeck&quot;:321}," calcext:value-type="string">
            <text:p>{"id":"1-57","name":"エイジング","kana":"えいじんぐ","traitText":null,"ruleText":"相手の戦場のイジン1体を指定して発動できる。そのイジンを裏にして魔力ゾーンに置く。","legacyText":"冥府発動","imageUrl":"https://one-draw.jp/ijinden/cardlist/001/card/01_057.png","expansion":15,"rarity":2,"type":3,"level":4,"color":4,"term":0,"trait":0,"legacy":2,"orderTable":96,"orderDeck":321},</text:p>
          </table:table-cell>
          <table:table-cell table:number-columns-repeated="16347"/>
        </table:table-row>
        <table:table-row table:style-name="ro2">
          <table:table-cell office:value-type="float" office:value="97" calcext:value-type="float">
            <text:p>97</text:p>
          </table:table-cell>
          <table:table-cell office:value-type="float" office:value="344" calcext:value-type="float">
            <text:p>344</text:p>
          </table:table-cell>
          <table:table-cell office:value-type="string" calcext:value-type="string">
            <text:p>1-58</text:p>
          </table:table-cell>
          <table:table-cell office:value-type="float" office:value="58" calcext:value-type="float">
            <text:p>58</text:p>
          </table:table-cell>
          <table:table-cell office:value-type="string" calcext:value-type="string">
            <text:p>カンテラ</text:p>
          </table:table-cell>
          <table:table-cell office:value-type="string" calcext:value-type="string">
            <text:p>かんてら</text:p>
          </table:table-cell>
          <table:table-cell office:value-type="string" calcext:value-type="string">
            <text:p>第１弾ブースターパック</text:p>
          </table:table-cell>
          <table:table-cell table:formula="of:=VLOOKUP([.G98];[$収録番号.$A$1:$収録番号.$B$9];2;0)" office:value-type="float" office:value="15" calcext:value-type="float">
            <text:p>15</text:p>
          </table:table-cell>
          <table:table-cell office:value-type="string" calcext:value-type="string">
            <text:p>N</text:p>
          </table:table-cell>
          <table:table-cell table:formula="of:=VLOOKUP([.I98];[$レアリティ番号.$A$1:$レアリティ番号.$B$4];2;0)" office:value-type="float" office:value="1" calcext:value-type="float">
            <text:p>1</text:p>
          </table:table-cell>
          <table:table-cell office:value-type="string" calcext:value-type="string">
            <text:p>マリョク</text:p>
          </table:table-cell>
          <table:table-cell table:formula="of:=VLOOKUP([.K98];[$種類番号.$A$1:$種類番号.$B$4];2;0)" office:value-type="float" office:value="4" calcext:value-type="float">
            <text:p>4</text:p>
          </table:table-cell>
          <table:table-cell office:value-type="string" calcext:value-type="string">
            <text:p>赤</text:p>
          </table:table-cell>
          <table:table-cell table:formula="of:=VLOOKUP([.M98];[$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9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8];[$特性番号.$A$1:$特性番号.$B$8];2;0);0)" office:value-type="float" office:value="0" calcext:value-type="float">
            <text:p>0</text:p>
          </table:table-cell>
          <table:table-cell office:value-type="string" calcext:value-type="string">
            <text:p>魔力ゾーンに置かれたとき、1ドローする。</text:p>
          </table:table-cell>
          <table:table-cell table:style-name="ce8" table:formula="of:=NA()" office:value-type="string" office:string-value="" calcext:value-type="error">
            <text:p>#N/A</text:p>
          </table:table-cell>
          <table:table-cell table:formula="of:=IFERROR(VLOOKUP([.$V98];[$遺業能力番号.$A$1:$遺業能力番号.$B$9];2;0);0)" office:value-type="float" office:value="0" calcext:value-type="float">
            <text:p>0</text:p>
          </table:table-cell>
          <table:table-cell office:value-type="string" calcext:value-type="string">
            <text:p>https://one-draw.jp/ijinden/cardlist/001/card/01_058.png</text:p>
          </table:table-cell>
          <table:table-cell table:formula="of:=CONCATENATE([$JSON.$A$1];[.$C98];[$JSON.$B$1];[.$E98];[$JSON.$C$1];[.$F98];[$JSON.$D$1];IF(ISNA([.$S98]);&quot;null&quot;;&quot;&quot;&quot;&quot;&amp;[.$S98]&amp;&quot;&quot;&quot;&quot;);[$JSON.$E$1];[.$U98];[$JSON.$F$1];IF(ISNA([.$V98]);&quot;null&quot;;&quot;&quot;&quot;&quot;&amp;[.$V98]&amp;&quot;&quot;&quot;&quot;);[$JSON.$G$1];[.$X98];[$JSON.$H$1];[.$H98];[$JSON.$I$1];[.J98];[$JSON.$J$1];[.$L98];[$JSON.$K$1];[.$O98];[$JSON.$L$1];[.$N98];[$JSON.$M$1];[.$R98];[$JSON.$N$1];[.$T98];[$JSON.$O$1];[.$W98];[$JSON.$P$1];[.$A98];[$JSON.$Q$1];[.$B98];[$JSON.$R$1])" office:value-type="string" office:string-value="{&quot;id&quot;:&quot;1-58&quot;,&quot;name&quot;:&quot;カンテラ&quot;,&quot;kana&quot;:&quot;かんてら&quot;,&quot;traitText&quot;:null,&quot;ruleText&quot;:&quot;魔力ゾーンに置かれたとき、1ドローする。&quot;,&quot;legacyText&quot;:null,&quot;imageUrl&quot;:&quot;https://one-draw.jp/ijinden/cardlist/001/card/01_058.png&quot;,&quot;expansion&quot;:15,&quot;rarity&quot;:1,&quot;type&quot;:4,&quot;level&quot;:1,&quot;color&quot;:1,&quot;term&quot;:0,&quot;trait&quot;:0,&quot;legacy&quot;:0,&quot;orderTable&quot;:97,&quot;orderDeck&quot;:344}," calcext:value-type="string">
            <text:p>{"id":"1-58","name":"カンテラ","kana":"かんてら","traitText":null,"ruleText":"魔力ゾーンに置かれたとき、1ドローする。","legacyText":null,"imageUrl":"https://one-draw.jp/ijinden/cardlist/001/card/01_058.png","expansion":15,"rarity":1,"type":4,"level":1,"color":1,"term":0,"trait":0,"legacy":0,"orderTable":97,"orderDeck":344},</text:p>
          </table:table-cell>
          <table:table-cell table:number-columns-repeated="16347"/>
        </table:table-row>
        <table:table-row table:style-name="ro2">
          <table:table-cell office:value-type="float" office:value="98" calcext:value-type="float">
            <text:p>98</text:p>
          </table:table-cell>
          <table:table-cell office:value-type="float" office:value="345" calcext:value-type="float">
            <text:p>345</text:p>
          </table:table-cell>
          <table:table-cell office:value-type="string" calcext:value-type="string">
            <text:p>1-59</text:p>
          </table:table-cell>
          <table:table-cell office:value-type="float" office:value="59" calcext:value-type="float">
            <text:p>59</text:p>
          </table:table-cell>
          <table:table-cell office:value-type="string" calcext:value-type="string">
            <text:p>ファイアソード</text:p>
          </table:table-cell>
          <table:table-cell office:value-type="string" calcext:value-type="string">
            <text:p>ふぁいあそーど</text:p>
          </table:table-cell>
          <table:table-cell office:value-type="string" calcext:value-type="string">
            <text:p>第１弾ブースターパック</text:p>
          </table:table-cell>
          <table:table-cell table:formula="of:=VLOOKUP([.G99];[$収録番号.$A$1:$収録番号.$B$9];2;0)" office:value-type="float" office:value="15" calcext:value-type="float">
            <text:p>15</text:p>
          </table:table-cell>
          <table:table-cell office:value-type="string" calcext:value-type="string">
            <text:p>N</text:p>
          </table:table-cell>
          <table:table-cell table:formula="of:=VLOOKUP([.I99];[$レアリティ番号.$A$1:$レアリティ番号.$B$4];2;0)" office:value-type="float" office:value="1" calcext:value-type="float">
            <text:p>1</text:p>
          </table:table-cell>
          <table:table-cell office:value-type="string" calcext:value-type="string">
            <text:p>マリョク</text:p>
          </table:table-cell>
          <table:table-cell table:formula="of:=VLOOKUP([.K99];[$種類番号.$A$1:$種類番号.$B$4];2;0)" office:value-type="float" office:value="4" calcext:value-type="float">
            <text:p>4</text:p>
          </table:table-cell>
          <table:table-cell office:value-type="string" calcext:value-type="string">
            <text:p>赤</text:p>
          </table:table-cell>
          <table:table-cell table:formula="of:=VLOOKUP([.M99];[$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9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9];[$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アタック+2000</text:p>
          </table:table-cell>
          <table:table-cell table:style-name="ce8" table:formula="of:=NA()" office:value-type="string" office:string-value="" calcext:value-type="error">
            <text:p>#N/A</text:p>
          </table:table-cell>
          <table:table-cell table:formula="of:=IFERROR(VLOOKUP([.$V99];[$遺業能力番号.$A$1:$遺業能力番号.$B$9];2;0);0)" office:value-type="float" office:value="0" calcext:value-type="float">
            <text:p>0</text:p>
          </table:table-cell>
          <table:table-cell office:value-type="string" calcext:value-type="string">
            <text:p>https://one-draw.jp/ijinden/cardlist/001/card/01_059.png</text:p>
          </table:table-cell>
          <table:table-cell table:formula="of:=CONCATENATE([$JSON.$A$1];[.$C99];[$JSON.$B$1];[.$E99];[$JSON.$C$1];[.$F99];[$JSON.$D$1];IF(ISNA([.$S99]);&quot;null&quot;;&quot;&quot;&quot;&quot;&amp;[.$S99]&amp;&quot;&quot;&quot;&quot;);[$JSON.$E$1];[.$U99];[$JSON.$F$1];IF(ISNA([.$V99]);&quot;null&quot;;&quot;&quot;&quot;&quot;&amp;[.$V99]&amp;&quot;&quot;&quot;&quot;);[$JSON.$G$1];[.$X99];[$JSON.$H$1];[.$H99];[$JSON.$I$1];[.J99];[$JSON.$J$1];[.$L99];[$JSON.$K$1];[.$O99];[$JSON.$L$1];[.$N99];[$JSON.$M$1];[.$R99];[$JSON.$N$1];[.$T99];[$JSON.$O$1];[.$W99];[$JSON.$P$1];[.$A99];[$JSON.$Q$1];[.$B99];[$JSON.$R$1])" office:value-type="string" office:string-value="{&quot;id&quot;:&quot;1-59&quot;,&quot;name&quot;:&quot;ファイアソード&quot;,&quot;kana&quot;:&quot;ふぁいあそーど&quot;,&quot;traitText&quot;:null,&quot;ruleText&quot;:&quot;イジン召喚によってイジンが自分の戦場に置かれる際、魔力ゾーンに置かれているこれを、そのイジンに装備させてもよい。¶装備 : アタック+2000&quot;,&quot;legacyText&quot;:null,&quot;imageUrl&quot;:&quot;https://one-draw.jp/ijinden/cardlist/001/card/01_059.png&quot;,&quot;expansion&quot;:15,&quot;rarity&quot;:1,&quot;type&quot;:4,&quot;level&quot;:1,&quot;color&quot;:1,&quot;term&quot;:0,&quot;trait&quot;:0,&quot;legacy&quot;:0,&quot;orderTable&quot;:98,&quot;orderDeck&quot;:345}," calcext:value-type="string">
            <text:p>{"id":"1-59","name":"ファイアソード","kana":"ふぁいあそーど","traitText":null,"ruleText":"イジン召喚によってイジンが自分の戦場に置かれる際、魔力ゾーンに置かれているこれを、そのイジンに装備させてもよい。¶装備 : アタック+2000","legacyText":null,"imageUrl":"https://one-draw.jp/ijinden/cardlist/001/card/01_059.png","expansion":15,"rarity":1,"type":4,"level":1,"color":1,"term":0,"trait":0,"legacy":0,"orderTable":98,"orderDeck":345},</text:p>
          </table:table-cell>
          <table:table-cell table:number-columns-repeated="16347"/>
        </table:table-row>
        <table:table-row table:style-name="ro2">
          <table:table-cell office:value-type="float" office:value="99" calcext:value-type="float">
            <text:p>99</text:p>
          </table:table-cell>
          <table:table-cell office:value-type="float" office:value="346" calcext:value-type="float">
            <text:p>346</text:p>
          </table:table-cell>
          <table:table-cell office:value-type="string" calcext:value-type="string">
            <text:p>1-60</text:p>
          </table:table-cell>
          <table:table-cell office:value-type="float" office:value="60" calcext:value-type="float">
            <text:p>60</text:p>
          </table:table-cell>
          <table:table-cell office:value-type="string" calcext:value-type="string">
            <text:p>髭切</text:p>
          </table:table-cell>
          <table:table-cell office:value-type="string" calcext:value-type="string">
            <text:p>ひげきり</text:p>
          </table:table-cell>
          <table:table-cell office:value-type="string" calcext:value-type="string">
            <text:p>第１弾ブースターパック</text:p>
          </table:table-cell>
          <table:table-cell table:formula="of:=VLOOKUP([.G100];[$収録番号.$A$1:$収録番号.$B$9];2;0)" office:value-type="float" office:value="15" calcext:value-type="float">
            <text:p>15</text:p>
          </table:table-cell>
          <table:table-cell office:value-type="string" calcext:value-type="string">
            <text:p>N</text:p>
          </table:table-cell>
          <table:table-cell table:formula="of:=VLOOKUP([.I100];[$レアリティ番号.$A$1:$レアリティ番号.$B$4];2;0)" office:value-type="float" office:value="1" calcext:value-type="float">
            <text:p>1</text:p>
          </table:table-cell>
          <table:table-cell office:value-type="string" calcext:value-type="string">
            <text:p>マリョク</text:p>
          </table:table-cell>
          <table:table-cell table:formula="of:=VLOOKUP([.K100];[$種類番号.$A$1:$種類番号.$B$4];2;0)" office:value-type="float" office:value="4" calcext:value-type="float">
            <text:p>4</text:p>
          </table:table-cell>
          <table:table-cell office:value-type="string" calcext:value-type="string">
            <text:p>赤</text:p>
          </table:table-cell>
          <table:table-cell table:formula="of:=VLOOKUP([.M100];[$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0];[$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特性：剣術」 アタック+1000</text:p>
          </table:table-cell>
          <table:table-cell table:style-name="ce8" office:value-type="string" calcext:value-type="string">
            <text:p>復元</text:p>
          </table:table-cell>
          <table:table-cell table:formula="of:=IFERROR(VLOOKUP([.$V100];[$遺業能力番号.$A$1:$遺業能力番号.$B$9];2;0);0)" office:value-type="float" office:value="3" calcext:value-type="float">
            <text:p>3</text:p>
          </table:table-cell>
          <table:table-cell office:value-type="string" calcext:value-type="string">
            <text:p>https://one-draw.jp/ijinden/cardlist/001/card/01_060.png</text:p>
          </table:table-cell>
          <table:table-cell table:formula="of:=CONCATENATE([$JSON.$A$1];[.$C100];[$JSON.$B$1];[.$E100];[$JSON.$C$1];[.$F100];[$JSON.$D$1];IF(ISNA([.$S100]);&quot;null&quot;;&quot;&quot;&quot;&quot;&amp;[.$S100]&amp;&quot;&quot;&quot;&quot;);[$JSON.$E$1];[.$U100];[$JSON.$F$1];IF(ISNA([.$V100]);&quot;null&quot;;&quot;&quot;&quot;&quot;&amp;[.$V100]&amp;&quot;&quot;&quot;&quot;);[$JSON.$G$1];[.$X100];[$JSON.$H$1];[.$H100];[$JSON.$I$1];[.J100];[$JSON.$J$1];[.$L100];[$JSON.$K$1];[.$O100];[$JSON.$L$1];[.$N100];[$JSON.$M$1];[.$R100];[$JSON.$N$1];[.$T100];[$JSON.$O$1];[.$W100];[$JSON.$P$1];[.$A100];[$JSON.$Q$1];[.$B100];[$JSON.$R$1])" office:value-type="string" office:string-value="{&quot;id&quot;:&quot;1-60&quot;,&quot;name&quot;:&quot;髭切&quot;,&quot;kana&quot;:&quot;ひげきり&quot;,&quot;traitText&quot;:null,&quot;ruleText&quot;:&quot;イジン召喚によってイジンが自分の戦場に置かれる際、魔力ゾーンに置かれているこれを、そのイジンに装備させてもよい。¶装備 : 「特性：剣術」 アタック+1000&quot;,&quot;legacyText&quot;:&quot;復元&quot;,&quot;imageUrl&quot;:&quot;https://one-draw.jp/ijinden/cardlist/001/card/01_060.png&quot;,&quot;expansion&quot;:15,&quot;rarity&quot;:1,&quot;type&quot;:4,&quot;level&quot;:1,&quot;color&quot;:1,&quot;term&quot;:0,&quot;trait&quot;:0,&quot;legacy&quot;:3,&quot;orderTable&quot;:99,&quot;orderDeck&quot;:346}," calcext:value-type="string">
            <text:p>{"id":"1-60","name":"髭切","kana":"ひげきり","traitText":null,"ruleText":"イジン召喚によってイジンが自分の戦場に置かれる際、魔力ゾーンに置かれているこれを、そのイジンに装備させてもよい。¶装備 : 「特性：剣術」 アタック+1000","legacyText":"復元","imageUrl":"https://one-draw.jp/ijinden/cardlist/001/card/01_060.png","expansion":15,"rarity":1,"type":4,"level":1,"color":1,"term":0,"trait":0,"legacy":3,"orderTable":99,"orderDeck":346},</text:p>
          </table:table-cell>
          <table:table-cell table:number-columns-repeated="16347"/>
        </table:table-row>
        <table:table-row table:style-name="ro2">
          <table:table-cell office:value-type="float" office:value="100" calcext:value-type="float">
            <text:p>100</text:p>
          </table:table-cell>
          <table:table-cell office:value-type="float" office:value="379" calcext:value-type="float">
            <text:p>379</text:p>
          </table:table-cell>
          <table:table-cell office:value-type="string" calcext:value-type="string">
            <text:p>1-61</text:p>
          </table:table-cell>
          <table:table-cell office:value-type="float" office:value="61" calcext:value-type="float">
            <text:p>61</text:p>
          </table:table-cell>
          <table:table-cell office:value-type="string" calcext:value-type="string">
            <text:p>レッドオーブ</text:p>
          </table:table-cell>
          <table:table-cell office:value-type="string" calcext:value-type="string">
            <text:p>れっどおーぶ</text:p>
          </table:table-cell>
          <table:table-cell office:value-type="string" calcext:value-type="string">
            <text:p>第１弾ブースターパック</text:p>
          </table:table-cell>
          <table:table-cell table:formula="of:=VLOOKUP([.G101];[$収録番号.$A$1:$収録番号.$B$9];2;0)" office:value-type="float" office:value="15" calcext:value-type="float">
            <text:p>15</text:p>
          </table:table-cell>
          <table:table-cell office:value-type="string" calcext:value-type="string">
            <text:p>R</text:p>
          </table:table-cell>
          <table:table-cell table:formula="of:=VLOOKUP([.I101];[$レアリティ番号.$A$1:$レアリティ番号.$B$4];2;0)" office:value-type="float" office:value="2" calcext:value-type="float">
            <text:p>2</text:p>
          </table:table-cell>
          <table:table-cell office:value-type="string" calcext:value-type="string">
            <text:p>マリョク</text:p>
          </table:table-cell>
          <table:table-cell table:formula="of:=VLOOKUP([.K101];[$種類番号.$A$1:$種類番号.$B$4];2;0)" office:value-type="float" office:value="4" calcext:value-type="float">
            <text:p>4</text:p>
          </table:table-cell>
          <table:table-cell office:value-type="string" calcext:value-type="string">
            <text:p>赤</text:p>
          </table:table-cell>
          <table:table-cell table:formula="of:=VLOOKUP([.M101];[$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1];[$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V101];[$遺業能力番号.$A$1:$遺業能力番号.$B$9];2;0);0)" office:value-type="float" office:value="3" calcext:value-type="float">
            <text:p>3</text:p>
          </table:table-cell>
          <table:table-cell office:value-type="string" calcext:value-type="string">
            <text:p>https://one-draw.jp/ijinden/cardlist/001/card/01_061.png</text:p>
          </table:table-cell>
          <table:table-cell table:formula="of:=CONCATENATE([$JSON.$A$1];[.$C101];[$JSON.$B$1];[.$E101];[$JSON.$C$1];[.$F101];[$JSON.$D$1];IF(ISNA([.$S101]);&quot;null&quot;;&quot;&quot;&quot;&quot;&amp;[.$S101]&amp;&quot;&quot;&quot;&quot;);[$JSON.$E$1];[.$U101];[$JSON.$F$1];IF(ISNA([.$V101]);&quot;null&quot;;&quot;&quot;&quot;&quot;&amp;[.$V101]&amp;&quot;&quot;&quot;&quot;);[$JSON.$G$1];[.$X101];[$JSON.$H$1];[.$H101];[$JSON.$I$1];[.J101];[$JSON.$J$1];[.$L101];[$JSON.$K$1];[.$O101];[$JSON.$L$1];[.$N101];[$JSON.$M$1];[.$R101];[$JSON.$N$1];[.$T101];[$JSON.$O$1];[.$W101];[$JSON.$P$1];[.$A101];[$JSON.$Q$1];[.$B101];[$JSON.$R$1])" office:value-type="string" office:string-value="{&quot;id&quot;:&quot;1-61&quot;,&quot;name&quot;:&quot;レッドオーブ&quot;,&quot;kana&quot;:&quot;れっどおーぶ&quot;,&quot;traitText&quot;:null,&quot;ruleText&quot;:&quot;&quot;,&quot;legacyText&quot;:&quot;復元&quot;,&quot;imageUrl&quot;:&quot;https://one-draw.jp/ijinden/cardlist/001/card/01_061.png&quot;,&quot;expansion&quot;:15,&quot;rarity&quot;:2,&quot;type&quot;:4,&quot;level&quot;:2,&quot;color&quot;:1,&quot;term&quot;:0,&quot;trait&quot;:0,&quot;legacy&quot;:3,&quot;orderTable&quot;:100,&quot;orderDeck&quot;:379}," calcext:value-type="string">
            <text:p>{"id":"1-61","name":"レッドオーブ","kana":"れっどおーぶ","traitText":null,"ruleText":"","legacyText":"復元","imageUrl":"https://one-draw.jp/ijinden/cardlist/001/card/01_061.png","expansion":15,"rarity":2,"type":4,"level":2,"color":1,"term":0,"trait":0,"legacy":3,"orderTable":100,"orderDeck":379},</text:p>
          </table:table-cell>
          <table:table-cell table:number-columns-repeated="16347"/>
        </table:table-row>
        <table:table-row table:style-name="ro2">
          <table:table-cell office:value-type="float" office:value="101" calcext:value-type="float">
            <text:p>101</text:p>
          </table:table-cell>
          <table:table-cell office:value-type="float" office:value="350" calcext:value-type="float">
            <text:p>350</text:p>
          </table:table-cell>
          <table:table-cell office:value-type="string" calcext:value-type="string">
            <text:p>1-62</text:p>
          </table:table-cell>
          <table:table-cell office:value-type="float" office:value="62" calcext:value-type="float">
            <text:p>62</text:p>
          </table:table-cell>
          <table:table-cell office:value-type="string" calcext:value-type="string">
            <text:p>ウォーターポット</text:p>
          </table:table-cell>
          <table:table-cell office:value-type="string" calcext:value-type="string">
            <text:p>うぉーたーぽっと</text:p>
          </table:table-cell>
          <table:table-cell office:value-type="string" calcext:value-type="string">
            <text:p>第１弾ブースターパック</text:p>
          </table:table-cell>
          <table:table-cell table:formula="of:=VLOOKUP([.G102];[$収録番号.$A$1:$収録番号.$B$9];2;0)" office:value-type="float" office:value="15" calcext:value-type="float">
            <text:p>15</text:p>
          </table:table-cell>
          <table:table-cell office:value-type="string" calcext:value-type="string">
            <text:p>N</text:p>
          </table:table-cell>
          <table:table-cell table:formula="of:=VLOOKUP([.I102];[$レアリティ番号.$A$1:$レアリティ番号.$B$4];2;0)" office:value-type="float" office:value="1" calcext:value-type="float">
            <text:p>1</text:p>
          </table:table-cell>
          <table:table-cell office:value-type="string" calcext:value-type="string">
            <text:p>マリョク</text:p>
          </table:table-cell>
          <table:table-cell table:formula="of:=VLOOKUP([.K102];[$種類番号.$A$1:$種類番号.$B$4];2;0)" office:value-type="float" office:value="4" calcext:value-type="float">
            <text:p>4</text:p>
          </table:table-cell>
          <table:table-cell office:value-type="string" calcext:value-type="string">
            <text:p>青</text:p>
          </table:table-cell>
          <table:table-cell table:formula="of:=VLOOKUP([.M102];[$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2];[$特性番号.$A$1:$特性番号.$B$8];2;0);0)" office:value-type="float" office:value="0" calcext:value-type="float">
            <text:p>0</text:p>
          </table:table-cell>
          <table:table-cell office:value-type="string" calcext:value-type="string">
            <text:p>魔力ゾーンに置かれたとき、1ドローする。</text:p>
          </table:table-cell>
          <table:table-cell table:style-name="ce8" table:formula="of:=NA()" office:value-type="string" office:string-value="" calcext:value-type="error">
            <text:p>#N/A</text:p>
          </table:table-cell>
          <table:table-cell table:formula="of:=IFERROR(VLOOKUP([.$V102];[$遺業能力番号.$A$1:$遺業能力番号.$B$9];2;0);0)" office:value-type="float" office:value="0" calcext:value-type="float">
            <text:p>0</text:p>
          </table:table-cell>
          <table:table-cell office:value-type="string" calcext:value-type="string">
            <text:p>https://one-draw.jp/ijinden/cardlist/001/card/01_062.png</text:p>
          </table:table-cell>
          <table:table-cell table:formula="of:=CONCATENATE([$JSON.$A$1];[.$C102];[$JSON.$B$1];[.$E102];[$JSON.$C$1];[.$F102];[$JSON.$D$1];IF(ISNA([.$S102]);&quot;null&quot;;&quot;&quot;&quot;&quot;&amp;[.$S102]&amp;&quot;&quot;&quot;&quot;);[$JSON.$E$1];[.$U102];[$JSON.$F$1];IF(ISNA([.$V102]);&quot;null&quot;;&quot;&quot;&quot;&quot;&amp;[.$V102]&amp;&quot;&quot;&quot;&quot;);[$JSON.$G$1];[.$X102];[$JSON.$H$1];[.$H102];[$JSON.$I$1];[.J102];[$JSON.$J$1];[.$L102];[$JSON.$K$1];[.$O102];[$JSON.$L$1];[.$N102];[$JSON.$M$1];[.$R102];[$JSON.$N$1];[.$T102];[$JSON.$O$1];[.$W102];[$JSON.$P$1];[.$A102];[$JSON.$Q$1];[.$B102];[$JSON.$R$1])" office:value-type="string" office:string-value="{&quot;id&quot;:&quot;1-62&quot;,&quot;name&quot;:&quot;ウォーターポット&quot;,&quot;kana&quot;:&quot;うぉーたーぽっと&quot;,&quot;traitText&quot;:null,&quot;ruleText&quot;:&quot;魔力ゾーンに置かれたとき、1ドローする。&quot;,&quot;legacyText&quot;:null,&quot;imageUrl&quot;:&quot;https://one-draw.jp/ijinden/cardlist/001/card/01_062.png&quot;,&quot;expansion&quot;:15,&quot;rarity&quot;:1,&quot;type&quot;:4,&quot;level&quot;:1,&quot;color&quot;:2,&quot;term&quot;:0,&quot;trait&quot;:0,&quot;legacy&quot;:0,&quot;orderTable&quot;:101,&quot;orderDeck&quot;:350}," calcext:value-type="string">
            <text:p>{"id":"1-62","name":"ウォーターポット","kana":"うぉーたーぽっと","traitText":null,"ruleText":"魔力ゾーンに置かれたとき、1ドローする。","legacyText":null,"imageUrl":"https://one-draw.jp/ijinden/cardlist/001/card/01_062.png","expansion":15,"rarity":1,"type":4,"level":1,"color":2,"term":0,"trait":0,"legacy":0,"orderTable":101,"orderDeck":350},</text:p>
          </table:table-cell>
          <table:table-cell table:number-columns-repeated="16347"/>
        </table:table-row>
        <table:table-row table:style-name="ro2">
          <table:table-cell office:value-type="float" office:value="102" calcext:value-type="float">
            <text:p>102</text:p>
          </table:table-cell>
          <table:table-cell office:value-type="float" office:value="351" calcext:value-type="float">
            <text:p>351</text:p>
          </table:table-cell>
          <table:table-cell office:value-type="string" calcext:value-type="string">
            <text:p>1-63</text:p>
          </table:table-cell>
          <table:table-cell office:value-type="float" office:value="63" calcext:value-type="float">
            <text:p>63</text:p>
          </table:table-cell>
          <table:table-cell office:value-type="string" calcext:value-type="string">
            <text:p>アイスソード</text:p>
          </table:table-cell>
          <table:table-cell office:value-type="string" calcext:value-type="string">
            <text:p>あいすそーど</text:p>
          </table:table-cell>
          <table:table-cell office:value-type="string" calcext:value-type="string">
            <text:p>第１弾ブースターパック</text:p>
          </table:table-cell>
          <table:table-cell table:formula="of:=VLOOKUP([.G103];[$収録番号.$A$1:$収録番号.$B$9];2;0)" office:value-type="float" office:value="15" calcext:value-type="float">
            <text:p>15</text:p>
          </table:table-cell>
          <table:table-cell office:value-type="string" calcext:value-type="string">
            <text:p>N</text:p>
          </table:table-cell>
          <table:table-cell table:formula="of:=VLOOKUP([.I103];[$レアリティ番号.$A$1:$レアリティ番号.$B$4];2;0)" office:value-type="float" office:value="1" calcext:value-type="float">
            <text:p>1</text:p>
          </table:table-cell>
          <table:table-cell office:value-type="string" calcext:value-type="string">
            <text:p>マリョク</text:p>
          </table:table-cell>
          <table:table-cell table:formula="of:=VLOOKUP([.K103];[$種類番号.$A$1:$種類番号.$B$4];2;0)" office:value-type="float" office:value="4" calcext:value-type="float">
            <text:p>4</text:p>
          </table:table-cell>
          <table:table-cell office:value-type="string" calcext:value-type="string">
            <text:p>青</text:p>
          </table:table-cell>
          <table:table-cell table:formula="of:=VLOOKUP([.M103];[$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3];[$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ブロック+2000</text:p>
          </table:table-cell>
          <table:table-cell table:style-name="ce8" table:formula="of:=NA()" office:value-type="string" office:string-value="" calcext:value-type="error">
            <text:p>#N/A</text:p>
          </table:table-cell>
          <table:table-cell table:formula="of:=IFERROR(VLOOKUP([.$V103];[$遺業能力番号.$A$1:$遺業能力番号.$B$9];2;0);0)" office:value-type="float" office:value="0" calcext:value-type="float">
            <text:p>0</text:p>
          </table:table-cell>
          <table:table-cell office:value-type="string" calcext:value-type="string">
            <text:p>https://one-draw.jp/ijinden/cardlist/001/card/01_063.png</text:p>
          </table:table-cell>
          <table:table-cell table:formula="of:=CONCATENATE([$JSON.$A$1];[.$C103];[$JSON.$B$1];[.$E103];[$JSON.$C$1];[.$F103];[$JSON.$D$1];IF(ISNA([.$S103]);&quot;null&quot;;&quot;&quot;&quot;&quot;&amp;[.$S103]&amp;&quot;&quot;&quot;&quot;);[$JSON.$E$1];[.$U103];[$JSON.$F$1];IF(ISNA([.$V103]);&quot;null&quot;;&quot;&quot;&quot;&quot;&amp;[.$V103]&amp;&quot;&quot;&quot;&quot;);[$JSON.$G$1];[.$X103];[$JSON.$H$1];[.$H103];[$JSON.$I$1];[.J103];[$JSON.$J$1];[.$L103];[$JSON.$K$1];[.$O103];[$JSON.$L$1];[.$N103];[$JSON.$M$1];[.$R103];[$JSON.$N$1];[.$T103];[$JSON.$O$1];[.$W103];[$JSON.$P$1];[.$A103];[$JSON.$Q$1];[.$B103];[$JSON.$R$1])" office:value-type="string" office:string-value="{&quot;id&quot;:&quot;1-63&quot;,&quot;name&quot;:&quot;アイスソード&quot;,&quot;kana&quot;:&quot;あいすそーど&quot;,&quot;traitText&quot;:null,&quot;ruleText&quot;:&quot;イジン召喚によってイジンが自分の戦場に置かれる際、魔力ゾーンに置かれているこれを、そのイジンに装備させてもよい。¶装備 : ブロック+2000&quot;,&quot;legacyText&quot;:null,&quot;imageUrl&quot;:&quot;https://one-draw.jp/ijinden/cardlist/001/card/01_063.png&quot;,&quot;expansion&quot;:15,&quot;rarity&quot;:1,&quot;type&quot;:4,&quot;level&quot;:1,&quot;color&quot;:2,&quot;term&quot;:0,&quot;trait&quot;:0,&quot;legacy&quot;:0,&quot;orderTable&quot;:102,&quot;orderDeck&quot;:351}," calcext:value-type="string">
            <text:p>{"id":"1-63","name":"アイスソード","kana":"あいすそーど","traitText":null,"ruleText":"イジン召喚によってイジンが自分の戦場に置かれる際、魔力ゾーンに置かれているこれを、そのイジンに装備させてもよい。¶装備 : ブロック+2000","legacyText":null,"imageUrl":"https://one-draw.jp/ijinden/cardlist/001/card/01_063.png","expansion":15,"rarity":1,"type":4,"level":1,"color":2,"term":0,"trait":0,"legacy":0,"orderTable":102,"orderDeck":351},</text:p>
          </table:table-cell>
          <table:table-cell table:number-columns-repeated="16347"/>
        </table:table-row>
        <table:table-row table:style-name="ro2">
          <table:table-cell office:value-type="float" office:value="103" calcext:value-type="float">
            <text:p>103</text:p>
          </table:table-cell>
          <table:table-cell office:value-type="float" office:value="352" calcext:value-type="float">
            <text:p>352</text:p>
          </table:table-cell>
          <table:table-cell office:value-type="string" calcext:value-type="string">
            <text:p>1-64</text:p>
          </table:table-cell>
          <table:table-cell office:value-type="float" office:value="64" calcext:value-type="float">
            <text:p>64</text:p>
          </table:table-cell>
          <table:table-cell office:value-type="string" calcext:value-type="string">
            <text:p>羅針盤</text:p>
          </table:table-cell>
          <table:table-cell office:value-type="string" calcext:value-type="string">
            <text:p>らしんばん</text:p>
          </table:table-cell>
          <table:table-cell office:value-type="string" calcext:value-type="string">
            <text:p>第１弾ブースターパック</text:p>
          </table:table-cell>
          <table:table-cell table:formula="of:=VLOOKUP([.G104];[$収録番号.$A$1:$収録番号.$B$9];2;0)" office:value-type="float" office:value="15" calcext:value-type="float">
            <text:p>15</text:p>
          </table:table-cell>
          <table:table-cell office:value-type="string" calcext:value-type="string">
            <text:p>N</text:p>
          </table:table-cell>
          <table:table-cell table:formula="of:=VLOOKUP([.I104];[$レアリティ番号.$A$1:$レアリティ番号.$B$4];2;0)" office:value-type="float" office:value="1" calcext:value-type="float">
            <text:p>1</text:p>
          </table:table-cell>
          <table:table-cell office:value-type="string" calcext:value-type="string">
            <text:p>マリョク</text:p>
          </table:table-cell>
          <table:table-cell table:formula="of:=VLOOKUP([.K104];[$種類番号.$A$1:$種類番号.$B$4];2;0)" office:value-type="float" office:value="4" calcext:value-type="float">
            <text:p>4</text:p>
          </table:table-cell>
          <table:table-cell office:value-type="string" calcext:value-type="string">
            <text:p>青</text:p>
          </table:table-cell>
          <table:table-cell table:formula="of:=VLOOKUP([.M104];[$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4];[$特性番号.$A$1:$特性番号.$B$8];2;0);0)" office:value-type="float" office:value="0" calcext:value-type="float">
            <text:p>0</text:p>
          </table:table-cell>
          <table:table-cell office:value-type="string" calcext:value-type="string">
            <text:p>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text:p>
          </table:table-cell>
          <table:table-cell table:style-name="ce8" office:value-type="string" calcext:value-type="string">
            <text:p>復元</text:p>
          </table:table-cell>
          <table:table-cell table:formula="of:=IFERROR(VLOOKUP([.$V104];[$遺業能力番号.$A$1:$遺業能力番号.$B$9];2;0);0)" office:value-type="float" office:value="3" calcext:value-type="float">
            <text:p>3</text:p>
          </table:table-cell>
          <table:table-cell office:value-type="string" calcext:value-type="string">
            <text:p>https://one-draw.jp/ijinden/cardlist/001/card/01_064.png</text:p>
          </table:table-cell>
          <table:table-cell table:formula="of:=CONCATENATE([$JSON.$A$1];[.$C104];[$JSON.$B$1];[.$E104];[$JSON.$C$1];[.$F104];[$JSON.$D$1];IF(ISNA([.$S104]);&quot;null&quot;;&quot;&quot;&quot;&quot;&amp;[.$S104]&amp;&quot;&quot;&quot;&quot;);[$JSON.$E$1];[.$U104];[$JSON.$F$1];IF(ISNA([.$V104]);&quot;null&quot;;&quot;&quot;&quot;&quot;&amp;[.$V104]&amp;&quot;&quot;&quot;&quot;);[$JSON.$G$1];[.$X104];[$JSON.$H$1];[.$H104];[$JSON.$I$1];[.J104];[$JSON.$J$1];[.$L104];[$JSON.$K$1];[.$O104];[$JSON.$L$1];[.$N104];[$JSON.$M$1];[.$R104];[$JSON.$N$1];[.$T104];[$JSON.$O$1];[.$W104];[$JSON.$P$1];[.$A104];[$JSON.$Q$1];[.$B104];[$JSON.$R$1])" office:value-type="string" office:string-value="{&quot;id&quot;:&quot;1-64&quot;,&quot;name&quot;:&quot;羅針盤&quot;,&quot;kana&quot;:&quot;らしんばん&quot;,&quot;traitText&quot;:null,&quot;ruleText&quot;:&quot;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quot;,&quot;legacyText&quot;:&quot;復元&quot;,&quot;imageUrl&quot;:&quot;https://one-draw.jp/ijinden/cardlist/001/card/01_064.png&quot;,&quot;expansion&quot;:15,&quot;rarity&quot;:1,&quot;type&quot;:4,&quot;level&quot;:1,&quot;color&quot;:2,&quot;term&quot;:0,&quot;trait&quot;:0,&quot;legacy&quot;:3,&quot;orderTable&quot;:103,&quot;orderDeck&quot;:352}," calcext:value-type="string">
            <text:p>{"id":"1-64","name":"羅針盤","kana":"らしんばん","traitText":null,"ruleText":"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legacyText":"復元","imageUrl":"https://one-draw.jp/ijinden/cardlist/001/card/01_064.png","expansion":15,"rarity":1,"type":4,"level":1,"color":2,"term":0,"trait":0,"legacy":3,"orderTable":103,"orderDeck":352},</text:p>
          </table:table-cell>
          <table:table-cell table:number-columns-repeated="16347"/>
        </table:table-row>
        <table:table-row table:style-name="ro2">
          <table:table-cell office:value-type="float" office:value="104" calcext:value-type="float">
            <text:p>104</text:p>
          </table:table-cell>
          <table:table-cell office:value-type="float" office:value="380" calcext:value-type="float">
            <text:p>380</text:p>
          </table:table-cell>
          <table:table-cell office:value-type="string" calcext:value-type="string">
            <text:p>1-65</text:p>
          </table:table-cell>
          <table:table-cell office:value-type="float" office:value="65" calcext:value-type="float">
            <text:p>65</text:p>
          </table:table-cell>
          <table:table-cell office:value-type="string" calcext:value-type="string">
            <text:p>ブルーオーブ</text:p>
          </table:table-cell>
          <table:table-cell office:value-type="string" calcext:value-type="string">
            <text:p>ぶるーおーぶ</text:p>
          </table:table-cell>
          <table:table-cell office:value-type="string" calcext:value-type="string">
            <text:p>第１弾ブースターパック</text:p>
          </table:table-cell>
          <table:table-cell table:formula="of:=VLOOKUP([.G105];[$収録番号.$A$1:$収録番号.$B$9];2;0)" office:value-type="float" office:value="15" calcext:value-type="float">
            <text:p>15</text:p>
          </table:table-cell>
          <table:table-cell office:value-type="string" calcext:value-type="string">
            <text:p>R</text:p>
          </table:table-cell>
          <table:table-cell table:formula="of:=VLOOKUP([.I105];[$レアリティ番号.$A$1:$レアリティ番号.$B$4];2;0)" office:value-type="float" office:value="2" calcext:value-type="float">
            <text:p>2</text:p>
          </table:table-cell>
          <table:table-cell office:value-type="string" calcext:value-type="string">
            <text:p>マリョク</text:p>
          </table:table-cell>
          <table:table-cell table:formula="of:=VLOOKUP([.K105];[$種類番号.$A$1:$種類番号.$B$4];2;0)" office:value-type="float" office:value="4" calcext:value-type="float">
            <text:p>4</text:p>
          </table:table-cell>
          <table:table-cell office:value-type="string" calcext:value-type="string">
            <text:p>青</text:p>
          </table:table-cell>
          <table:table-cell table:formula="of:=VLOOKUP([.M105];[$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5];[$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V105];[$遺業能力番号.$A$1:$遺業能力番号.$B$9];2;0);0)" office:value-type="float" office:value="3" calcext:value-type="float">
            <text:p>3</text:p>
          </table:table-cell>
          <table:table-cell office:value-type="string" calcext:value-type="string">
            <text:p>https://one-draw.jp/ijinden/cardlist/001/card/01_065.png</text:p>
          </table:table-cell>
          <table:table-cell table:formula="of:=CONCATENATE([$JSON.$A$1];[.$C105];[$JSON.$B$1];[.$E105];[$JSON.$C$1];[.$F105];[$JSON.$D$1];IF(ISNA([.$S105]);&quot;null&quot;;&quot;&quot;&quot;&quot;&amp;[.$S105]&amp;&quot;&quot;&quot;&quot;);[$JSON.$E$1];[.$U105];[$JSON.$F$1];IF(ISNA([.$V105]);&quot;null&quot;;&quot;&quot;&quot;&quot;&amp;[.$V105]&amp;&quot;&quot;&quot;&quot;);[$JSON.$G$1];[.$X105];[$JSON.$H$1];[.$H105];[$JSON.$I$1];[.J105];[$JSON.$J$1];[.$L105];[$JSON.$K$1];[.$O105];[$JSON.$L$1];[.$N105];[$JSON.$M$1];[.$R105];[$JSON.$N$1];[.$T105];[$JSON.$O$1];[.$W105];[$JSON.$P$1];[.$A105];[$JSON.$Q$1];[.$B105];[$JSON.$R$1])" office:value-type="string" office:string-value="{&quot;id&quot;:&quot;1-65&quot;,&quot;name&quot;:&quot;ブルーオーブ&quot;,&quot;kana&quot;:&quot;ぶるーおーぶ&quot;,&quot;traitText&quot;:null,&quot;ruleText&quot;:&quot;&quot;,&quot;legacyText&quot;:&quot;復元&quot;,&quot;imageUrl&quot;:&quot;https://one-draw.jp/ijinden/cardlist/001/card/01_065.png&quot;,&quot;expansion&quot;:15,&quot;rarity&quot;:2,&quot;type&quot;:4,&quot;level&quot;:2,&quot;color&quot;:2,&quot;term&quot;:0,&quot;trait&quot;:0,&quot;legacy&quot;:3,&quot;orderTable&quot;:104,&quot;orderDeck&quot;:380}," calcext:value-type="string">
            <text:p>{"id":"1-65","name":"ブルーオーブ","kana":"ぶるーおーぶ","traitText":null,"ruleText":"","legacyText":"復元","imageUrl":"https://one-draw.jp/ijinden/cardlist/001/card/01_065.png","expansion":15,"rarity":2,"type":4,"level":2,"color":2,"term":0,"trait":0,"legacy":3,"orderTable":104,"orderDeck":380},</text:p>
          </table:table-cell>
          <table:table-cell table:number-columns-repeated="16347"/>
        </table:table-row>
        <table:table-row table:style-name="ro2">
          <table:table-cell office:value-type="float" office:value="105" calcext:value-type="float">
            <text:p>105</text:p>
          </table:table-cell>
          <table:table-cell office:value-type="float" office:value="356" calcext:value-type="float">
            <text:p>356</text:p>
          </table:table-cell>
          <table:table-cell office:value-type="string" calcext:value-type="string">
            <text:p>1-66</text:p>
          </table:table-cell>
          <table:table-cell office:value-type="float" office:value="66" calcext:value-type="float">
            <text:p>66</text:p>
          </table:table-cell>
          <table:table-cell office:value-type="string" calcext:value-type="string">
            <text:p>ポプリ</text:p>
          </table:table-cell>
          <table:table-cell office:value-type="string" calcext:value-type="string">
            <text:p>ぽぷり</text:p>
          </table:table-cell>
          <table:table-cell office:value-type="string" calcext:value-type="string">
            <text:p>第１弾ブースターパック</text:p>
          </table:table-cell>
          <table:table-cell table:formula="of:=VLOOKUP([.G106];[$収録番号.$A$1:$収録番号.$B$9];2;0)" office:value-type="float" office:value="15" calcext:value-type="float">
            <text:p>15</text:p>
          </table:table-cell>
          <table:table-cell office:value-type="string" calcext:value-type="string">
            <text:p>N</text:p>
          </table:table-cell>
          <table:table-cell table:formula="of:=VLOOKUP([.I106];[$レアリティ番号.$A$1:$レアリティ番号.$B$4];2;0)" office:value-type="float" office:value="1" calcext:value-type="float">
            <text:p>1</text:p>
          </table:table-cell>
          <table:table-cell office:value-type="string" calcext:value-type="string">
            <text:p>マリョク</text:p>
          </table:table-cell>
          <table:table-cell table:formula="of:=VLOOKUP([.K106];[$種類番号.$A$1:$種類番号.$B$4];2;0)" office:value-type="float" office:value="4" calcext:value-type="float">
            <text:p>4</text:p>
          </table:table-cell>
          <table:table-cell office:value-type="string" calcext:value-type="string">
            <text:p>緑</text:p>
          </table:table-cell>
          <table:table-cell table:formula="of:=VLOOKUP([.M106];[$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6];[$特性番号.$A$1:$特性番号.$B$8];2;0);0)" office:value-type="float" office:value="0" calcext:value-type="float">
            <text:p>0</text:p>
          </table:table-cell>
          <table:table-cell office:value-type="string" calcext:value-type="string">
            <text:p>魔力ゾーンに置かれたとき、1ドローする。</text:p>
          </table:table-cell>
          <table:table-cell table:style-name="ce8" table:formula="of:=NA()" office:value-type="string" office:string-value="" calcext:value-type="error">
            <text:p>#N/A</text:p>
          </table:table-cell>
          <table:table-cell table:formula="of:=IFERROR(VLOOKUP([.$V106];[$遺業能力番号.$A$1:$遺業能力番号.$B$9];2;0);0)" office:value-type="float" office:value="0" calcext:value-type="float">
            <text:p>0</text:p>
          </table:table-cell>
          <table:table-cell office:value-type="string" calcext:value-type="string">
            <text:p>https://one-draw.jp/ijinden/cardlist/001/card/01_066.png</text:p>
          </table:table-cell>
          <table:table-cell table:formula="of:=CONCATENATE([$JSON.$A$1];[.$C106];[$JSON.$B$1];[.$E106];[$JSON.$C$1];[.$F106];[$JSON.$D$1];IF(ISNA([.$S106]);&quot;null&quot;;&quot;&quot;&quot;&quot;&amp;[.$S106]&amp;&quot;&quot;&quot;&quot;);[$JSON.$E$1];[.$U106];[$JSON.$F$1];IF(ISNA([.$V106]);&quot;null&quot;;&quot;&quot;&quot;&quot;&amp;[.$V106]&amp;&quot;&quot;&quot;&quot;);[$JSON.$G$1];[.$X106];[$JSON.$H$1];[.$H106];[$JSON.$I$1];[.J106];[$JSON.$J$1];[.$L106];[$JSON.$K$1];[.$O106];[$JSON.$L$1];[.$N106];[$JSON.$M$1];[.$R106];[$JSON.$N$1];[.$T106];[$JSON.$O$1];[.$W106];[$JSON.$P$1];[.$A106];[$JSON.$Q$1];[.$B106];[$JSON.$R$1])" office:value-type="string" office:string-value="{&quot;id&quot;:&quot;1-66&quot;,&quot;name&quot;:&quot;ポプリ&quot;,&quot;kana&quot;:&quot;ぽぷり&quot;,&quot;traitText&quot;:null,&quot;ruleText&quot;:&quot;魔力ゾーンに置かれたとき、1ドローする。&quot;,&quot;legacyText&quot;:null,&quot;imageUrl&quot;:&quot;https://one-draw.jp/ijinden/cardlist/001/card/01_066.png&quot;,&quot;expansion&quot;:15,&quot;rarity&quot;:1,&quot;type&quot;:4,&quot;level&quot;:1,&quot;color&quot;:4,&quot;term&quot;:0,&quot;trait&quot;:0,&quot;legacy&quot;:0,&quot;orderTable&quot;:105,&quot;orderDeck&quot;:356}," calcext:value-type="string">
            <text:p>{"id":"1-66","name":"ポプリ","kana":"ぽぷり","traitText":null,"ruleText":"魔力ゾーンに置かれたとき、1ドローする。","legacyText":null,"imageUrl":"https://one-draw.jp/ijinden/cardlist/001/card/01_066.png","expansion":15,"rarity":1,"type":4,"level":1,"color":4,"term":0,"trait":0,"legacy":0,"orderTable":105,"orderDeck":356},</text:p>
          </table:table-cell>
          <table:table-cell table:number-columns-repeated="16347"/>
        </table:table-row>
        <table:table-row table:style-name="ro2">
          <table:table-cell office:value-type="float" office:value="106" calcext:value-type="float">
            <text:p>106</text:p>
          </table:table-cell>
          <table:table-cell office:value-type="float" office:value="357" calcext:value-type="float">
            <text:p>357</text:p>
          </table:table-cell>
          <table:table-cell office:value-type="string" calcext:value-type="string">
            <text:p>1-67</text:p>
          </table:table-cell>
          <table:table-cell office:value-type="float" office:value="67" calcext:value-type="float">
            <text:p>67</text:p>
          </table:table-cell>
          <table:table-cell office:value-type="string" calcext:value-type="string">
            <text:p>ウッドスタッフ</text:p>
          </table:table-cell>
          <table:table-cell office:value-type="string" calcext:value-type="string">
            <text:p>うっどすたっふ</text:p>
          </table:table-cell>
          <table:table-cell office:value-type="string" calcext:value-type="string">
            <text:p>第１弾ブースターパック</text:p>
          </table:table-cell>
          <table:table-cell table:formula="of:=VLOOKUP([.G107];[$収録番号.$A$1:$収録番号.$B$9];2;0)" office:value-type="float" office:value="15" calcext:value-type="float">
            <text:p>15</text:p>
          </table:table-cell>
          <table:table-cell office:value-type="string" calcext:value-type="string">
            <text:p>N</text:p>
          </table:table-cell>
          <table:table-cell table:formula="of:=VLOOKUP([.I107];[$レアリティ番号.$A$1:$レアリティ番号.$B$4];2;0)" office:value-type="float" office:value="1" calcext:value-type="float">
            <text:p>1</text:p>
          </table:table-cell>
          <table:table-cell office:value-type="string" calcext:value-type="string">
            <text:p>マリョク</text:p>
          </table:table-cell>
          <table:table-cell table:formula="of:=VLOOKUP([.K107];[$種類番号.$A$1:$種類番号.$B$4];2;0)" office:value-type="float" office:value="4" calcext:value-type="float">
            <text:p>4</text:p>
          </table:table-cell>
          <table:table-cell office:value-type="string" calcext:value-type="string">
            <text:p>緑</text:p>
          </table:table-cell>
          <table:table-cell table:formula="of:=VLOOKUP([.M107];[$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7];[$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パワー+1000</text:p>
          </table:table-cell>
          <table:table-cell table:style-name="ce8" table:formula="of:=NA()" office:value-type="string" office:string-value="" calcext:value-type="error">
            <text:p>#N/A</text:p>
          </table:table-cell>
          <table:table-cell table:formula="of:=IFERROR(VLOOKUP([.$V107];[$遺業能力番号.$A$1:$遺業能力番号.$B$9];2;0);0)" office:value-type="float" office:value="0" calcext:value-type="float">
            <text:p>0</text:p>
          </table:table-cell>
          <table:table-cell office:value-type="string" calcext:value-type="string">
            <text:p>https://one-draw.jp/ijinden/cardlist/001/card/01_067.png</text:p>
          </table:table-cell>
          <table:table-cell table:formula="of:=CONCATENATE([$JSON.$A$1];[.$C107];[$JSON.$B$1];[.$E107];[$JSON.$C$1];[.$F107];[$JSON.$D$1];IF(ISNA([.$S107]);&quot;null&quot;;&quot;&quot;&quot;&quot;&amp;[.$S107]&amp;&quot;&quot;&quot;&quot;);[$JSON.$E$1];[.$U107];[$JSON.$F$1];IF(ISNA([.$V107]);&quot;null&quot;;&quot;&quot;&quot;&quot;&amp;[.$V107]&amp;&quot;&quot;&quot;&quot;);[$JSON.$G$1];[.$X107];[$JSON.$H$1];[.$H107];[$JSON.$I$1];[.J107];[$JSON.$J$1];[.$L107];[$JSON.$K$1];[.$O107];[$JSON.$L$1];[.$N107];[$JSON.$M$1];[.$R107];[$JSON.$N$1];[.$T107];[$JSON.$O$1];[.$W107];[$JSON.$P$1];[.$A107];[$JSON.$Q$1];[.$B107];[$JSON.$R$1])" office:value-type="string" office:string-value="{&quot;id&quot;:&quot;1-67&quot;,&quot;name&quot;:&quot;ウッドスタッフ&quot;,&quot;kana&quot;:&quot;うっどすたっふ&quot;,&quot;traitText&quot;:null,&quot;ruleText&quot;:&quot;イジン召喚によってイジンが自分の戦場に置かれる際、魔力ゾーンに置かれているこれを、そのイジンに装備させてもよい。¶装備 : パワー+1000&quot;,&quot;legacyText&quot;:null,&quot;imageUrl&quot;:&quot;https://one-draw.jp/ijinden/cardlist/001/card/01_067.png&quot;,&quot;expansion&quot;:15,&quot;rarity&quot;:1,&quot;type&quot;:4,&quot;level&quot;:1,&quot;color&quot;:4,&quot;term&quot;:0,&quot;trait&quot;:0,&quot;legacy&quot;:0,&quot;orderTable&quot;:106,&quot;orderDeck&quot;:357}," calcext:value-type="string">
            <text:p>{"id":"1-67","name":"ウッドスタッフ","kana":"うっどすたっふ","traitText":null,"ruleText":"イジン召喚によってイジンが自分の戦場に置かれる際、魔力ゾーンに置かれているこれを、そのイジンに装備させてもよい。¶装備 : パワー+1000","legacyText":null,"imageUrl":"https://one-draw.jp/ijinden/cardlist/001/card/01_067.png","expansion":15,"rarity":1,"type":4,"level":1,"color":4,"term":0,"trait":0,"legacy":0,"orderTable":106,"orderDeck":357},</text:p>
          </table:table-cell>
          <table:table-cell table:number-columns-repeated="16347"/>
        </table:table-row>
        <table:table-row table:style-name="ro2">
          <table:table-cell office:value-type="float" office:value="107" calcext:value-type="float">
            <text:p>107</text:p>
          </table:table-cell>
          <table:table-cell office:value-type="float" office:value="358" calcext:value-type="float">
            <text:p>358</text:p>
          </table:table-cell>
          <table:table-cell office:value-type="string" calcext:value-type="string">
            <text:p>1-68</text:p>
          </table:table-cell>
          <table:table-cell office:value-type="float" office:value="68" calcext:value-type="float">
            <text:p>68</text:p>
          </table:table-cell>
          <table:table-cell office:value-type="string" calcext:value-type="string">
            <text:p>万葉集</text:p>
          </table:table-cell>
          <table:table-cell office:value-type="string" calcext:value-type="string">
            <text:p>まんようしゅう</text:p>
          </table:table-cell>
          <table:table-cell office:value-type="string" calcext:value-type="string">
            <text:p>第１弾ブースターパック</text:p>
          </table:table-cell>
          <table:table-cell table:formula="of:=VLOOKUP([.G108];[$収録番号.$A$1:$収録番号.$B$9];2;0)" office:value-type="float" office:value="15" calcext:value-type="float">
            <text:p>15</text:p>
          </table:table-cell>
          <table:table-cell office:value-type="string" calcext:value-type="string">
            <text:p>N</text:p>
          </table:table-cell>
          <table:table-cell table:formula="of:=VLOOKUP([.I108];[$レアリティ番号.$A$1:$レアリティ番号.$B$4];2;0)" office:value-type="float" office:value="1" calcext:value-type="float">
            <text:p>1</text:p>
          </table:table-cell>
          <table:table-cell office:value-type="string" calcext:value-type="string">
            <text:p>マリョク</text:p>
          </table:table-cell>
          <table:table-cell table:formula="of:=VLOOKUP([.K108];[$種類番号.$A$1:$種類番号.$B$4];2;0)" office:value-type="float" office:value="4" calcext:value-type="float">
            <text:p>4</text:p>
          </table:table-cell>
          <table:table-cell office:value-type="string" calcext:value-type="string">
            <text:p>緑</text:p>
          </table:table-cell>
          <table:table-cell table:formula="of:=VLOOKUP([.M108];[$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8];[$特性番号.$A$1:$特性番号.$B$8];2;0);0)" office:value-type="float" office:value="0" calcext:value-type="float">
            <text:p>0</text:p>
          </table:table-cell>
          <table:table-cell office:value-type="string" calcext:value-type="string">
            <text:p>イジン召喚によって「執筆」を持つイジンが自分の戦場に置かれる際、魔力ゾーンに置かれているこれを、そのイジンに装備させてもよい。¶装備 : これが戦場にいる間、自分の魔力ゾーンの合計レベル+2する。</text:p>
          </table:table-cell>
          <table:table-cell table:style-name="ce8" office:value-type="string" calcext:value-type="string">
            <text:p>復元</text:p>
          </table:table-cell>
          <table:table-cell table:formula="of:=IFERROR(VLOOKUP([.$V108];[$遺業能力番号.$A$1:$遺業能力番号.$B$9];2;0);0)" office:value-type="float" office:value="3" calcext:value-type="float">
            <text:p>3</text:p>
          </table:table-cell>
          <table:table-cell office:value-type="string" calcext:value-type="string">
            <text:p>https://one-draw.jp/ijinden/cardlist/001/card/01_068.png</text:p>
          </table:table-cell>
          <table:table-cell table:formula="of:=CONCATENATE([$JSON.$A$1];[.$C108];[$JSON.$B$1];[.$E108];[$JSON.$C$1];[.$F108];[$JSON.$D$1];IF(ISNA([.$S108]);&quot;null&quot;;&quot;&quot;&quot;&quot;&amp;[.$S108]&amp;&quot;&quot;&quot;&quot;);[$JSON.$E$1];[.$U108];[$JSON.$F$1];IF(ISNA([.$V108]);&quot;null&quot;;&quot;&quot;&quot;&quot;&amp;[.$V108]&amp;&quot;&quot;&quot;&quot;);[$JSON.$G$1];[.$X108];[$JSON.$H$1];[.$H108];[$JSON.$I$1];[.J108];[$JSON.$J$1];[.$L108];[$JSON.$K$1];[.$O108];[$JSON.$L$1];[.$N108];[$JSON.$M$1];[.$R108];[$JSON.$N$1];[.$T108];[$JSON.$O$1];[.$W108];[$JSON.$P$1];[.$A108];[$JSON.$Q$1];[.$B108];[$JSON.$R$1])" office:value-type="string" office:string-value="{&quot;id&quot;:&quot;1-68&quot;,&quot;name&quot;:&quot;万葉集&quot;,&quot;kana&quot;:&quot;まんようしゅう&quot;,&quot;traitText&quot;:null,&quot;ruleText&quot;:&quot;イジン召喚によって「執筆」を持つイジンが自分の戦場に置かれる際、魔力ゾーンに置かれているこれを、そのイジンに装備させてもよい。¶装備 : これが戦場にいる間、自分の魔力ゾーンの合計レベル+2する。&quot;,&quot;legacyText&quot;:&quot;復元&quot;,&quot;imageUrl&quot;:&quot;https://one-draw.jp/ijinden/cardlist/001/card/01_068.png&quot;,&quot;expansion&quot;:15,&quot;rarity&quot;:1,&quot;type&quot;:4,&quot;level&quot;:1,&quot;color&quot;:4,&quot;term&quot;:0,&quot;trait&quot;:0,&quot;legacy&quot;:3,&quot;orderTable&quot;:107,&quot;orderDeck&quot;:358}," calcext:value-type="string">
            <text:p>{"id":"1-68","name":"万葉集","kana":"まんようしゅう","traitText":null,"ruleText":"イジン召喚によって「執筆」を持つイジンが自分の戦場に置かれる際、魔力ゾーンに置かれているこれを、そのイジンに装備させてもよい。¶装備 : これが戦場にいる間、自分の魔力ゾーンの合計レベル+2する。","legacyText":"復元","imageUrl":"https://one-draw.jp/ijinden/cardlist/001/card/01_068.png","expansion":15,"rarity":1,"type":4,"level":1,"color":4,"term":0,"trait":0,"legacy":3,"orderTable":107,"orderDeck":358},</text:p>
          </table:table-cell>
          <table:table-cell table:number-columns-repeated="16347"/>
        </table:table-row>
        <table:table-row table:style-name="ro2">
          <table:table-cell office:value-type="float" office:value="108" calcext:value-type="float">
            <text:p>108</text:p>
          </table:table-cell>
          <table:table-cell office:value-type="float" office:value="381" calcext:value-type="float">
            <text:p>381</text:p>
          </table:table-cell>
          <table:table-cell office:value-type="string" calcext:value-type="string">
            <text:p>1-69</text:p>
          </table:table-cell>
          <table:table-cell office:value-type="float" office:value="69" calcext:value-type="float">
            <text:p>69</text:p>
          </table:table-cell>
          <table:table-cell office:value-type="string" calcext:value-type="string">
            <text:p>グリーンオーブ</text:p>
          </table:table-cell>
          <table:table-cell office:value-type="string" calcext:value-type="string">
            <text:p>ぐりーんおーぶ</text:p>
          </table:table-cell>
          <table:table-cell office:value-type="string" calcext:value-type="string">
            <text:p>第１弾ブースターパック</text:p>
          </table:table-cell>
          <table:table-cell table:formula="of:=VLOOKUP([.G109];[$収録番号.$A$1:$収録番号.$B$9];2;0)" office:value-type="float" office:value="15" calcext:value-type="float">
            <text:p>15</text:p>
          </table:table-cell>
          <table:table-cell office:value-type="string" calcext:value-type="string">
            <text:p>R</text:p>
          </table:table-cell>
          <table:table-cell table:formula="of:=VLOOKUP([.I109];[$レアリティ番号.$A$1:$レアリティ番号.$B$4];2;0)" office:value-type="float" office:value="2" calcext:value-type="float">
            <text:p>2</text:p>
          </table:table-cell>
          <table:table-cell office:value-type="string" calcext:value-type="string">
            <text:p>マリョク</text:p>
          </table:table-cell>
          <table:table-cell table:formula="of:=VLOOKUP([.K109];[$種類番号.$A$1:$種類番号.$B$4];2;0)" office:value-type="float" office:value="4" calcext:value-type="float">
            <text:p>4</text:p>
          </table:table-cell>
          <table:table-cell office:value-type="string" calcext:value-type="string">
            <text:p>緑</text:p>
          </table:table-cell>
          <table:table-cell table:formula="of:=VLOOKUP([.M10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9];[$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V109];[$遺業能力番号.$A$1:$遺業能力番号.$B$9];2;0);0)" office:value-type="float" office:value="3" calcext:value-type="float">
            <text:p>3</text:p>
          </table:table-cell>
          <table:table-cell office:value-type="string" calcext:value-type="string">
            <text:p>https://one-draw.jp/ijinden/cardlist/001/card/01_069.png</text:p>
          </table:table-cell>
          <table:table-cell table:formula="of:=CONCATENATE([$JSON.$A$1];[.$C109];[$JSON.$B$1];[.$E109];[$JSON.$C$1];[.$F109];[$JSON.$D$1];IF(ISNA([.$S109]);&quot;null&quot;;&quot;&quot;&quot;&quot;&amp;[.$S109]&amp;&quot;&quot;&quot;&quot;);[$JSON.$E$1];[.$U109];[$JSON.$F$1];IF(ISNA([.$V109]);&quot;null&quot;;&quot;&quot;&quot;&quot;&amp;[.$V109]&amp;&quot;&quot;&quot;&quot;);[$JSON.$G$1];[.$X109];[$JSON.$H$1];[.$H109];[$JSON.$I$1];[.J109];[$JSON.$J$1];[.$L109];[$JSON.$K$1];[.$O109];[$JSON.$L$1];[.$N109];[$JSON.$M$1];[.$R109];[$JSON.$N$1];[.$T109];[$JSON.$O$1];[.$W109];[$JSON.$P$1];[.$A109];[$JSON.$Q$1];[.$B109];[$JSON.$R$1])" office:value-type="string" office:string-value="{&quot;id&quot;:&quot;1-69&quot;,&quot;name&quot;:&quot;グリーンオーブ&quot;,&quot;kana&quot;:&quot;ぐりーんおーぶ&quot;,&quot;traitText&quot;:null,&quot;ruleText&quot;:&quot;&quot;,&quot;legacyText&quot;:&quot;復元&quot;,&quot;imageUrl&quot;:&quot;https://one-draw.jp/ijinden/cardlist/001/card/01_069.png&quot;,&quot;expansion&quot;:15,&quot;rarity&quot;:2,&quot;type&quot;:4,&quot;level&quot;:2,&quot;color&quot;:4,&quot;term&quot;:0,&quot;trait&quot;:0,&quot;legacy&quot;:3,&quot;orderTable&quot;:108,&quot;orderDeck&quot;:381}," calcext:value-type="string">
            <text:p>{"id":"1-69","name":"グリーンオーブ","kana":"ぐりーんおーぶ","traitText":null,"ruleText":"","legacyText":"復元","imageUrl":"https://one-draw.jp/ijinden/cardlist/001/card/01_069.png","expansion":15,"rarity":2,"type":4,"level":2,"color":4,"term":0,"trait":0,"legacy":3,"orderTable":108,"orderDeck":381},</text:p>
          </table:table-cell>
          <table:table-cell table:number-columns-repeated="16347"/>
        </table:table-row>
        <table:table-row table:style-name="ro2">
          <table:table-cell office:value-type="float" office:value="109" calcext:value-type="float">
            <text:p>109</text:p>
          </table:table-cell>
          <table:table-cell office:value-type="float" office:value="68" calcext:value-type="float">
            <text:p>68</text:p>
          </table:table-cell>
          <table:table-cell office:value-type="string" calcext:value-type="string">
            <text:p>1-70</text:p>
          </table:table-cell>
          <table:table-cell office:value-type="float" office:value="70" calcext:value-type="float">
            <text:p>70</text:p>
          </table:table-cell>
          <table:table-cell office:value-type="string" calcext:value-type="string">
            <text:p>ビスマルク</text:p>
          </table:table-cell>
          <table:table-cell office:value-type="string" calcext:value-type="string">
            <text:p>びすまるく</text:p>
          </table:table-cell>
          <table:table-cell office:value-type="string" calcext:value-type="string">
            <text:p>第１弾ブースターパック</text:p>
          </table:table-cell>
          <table:table-cell table:formula="of:=VLOOKUP([.G110];[$収録番号.$A$1:$収録番号.$B$9];2;0)" office:value-type="float" office:value="15" calcext:value-type="float">
            <text:p>15</text:p>
          </table:table-cell>
          <table:table-cell office:value-type="string" calcext:value-type="string">
            <text:p>N</text:p>
          </table:table-cell>
          <table:table-cell table:formula="of:=VLOOKUP([.I110];[$レアリティ番号.$A$1:$レアリティ番号.$B$4];2;0)" office:value-type="float" office:value="1" calcext:value-type="float">
            <text:p>1</text:p>
          </table:table-cell>
          <table:table-cell office:value-type="string" calcext:value-type="string">
            <text:p>イジン</text:p>
          </table:table-cell>
          <table:table-cell table:formula="of:=VLOOKUP([.K110];[$種類番号.$A$1:$種類番号.$B$4];2;0)" office:value-type="float" office:value="1" calcext:value-type="float">
            <text:p>1</text:p>
          </table:table-cell>
          <table:table-cell office:value-type="string" calcext:value-type="string">
            <text:p>赤</text:p>
          </table:table-cell>
          <table:table-cell table:formula="of:=VLOOKUP([.M110];[$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0];[$特性番号.$A$1:$特性番号.$B$8];2;0);0)" office:value-type="float" office:value="0" calcext:value-type="float">
            <text:p>0</text:p>
          </table:table-cell>
          <table:table-cell office:value-type="string" calcext:value-type="string">
            <text:p>ダブルプレッシャー¶アタッカーになったとき、自分の戦場のイジン1体を破壊する。</text:p>
          </table:table-cell>
          <table:table-cell table:style-name="ce8" table:formula="of:=NA()" office:value-type="string" office:string-value="" calcext:value-type="error">
            <text:p>#N/A</text:p>
          </table:table-cell>
          <table:table-cell table:formula="of:=IFERROR(VLOOKUP([.$V110];[$遺業能力番号.$A$1:$遺業能力番号.$B$9];2;0);0)" office:value-type="float" office:value="0" calcext:value-type="float">
            <text:p>0</text:p>
          </table:table-cell>
          <table:table-cell office:value-type="string" calcext:value-type="string">
            <text:p>https://one-draw.jp/ijinden/cardlist/001/card/01_070.png</text:p>
          </table:table-cell>
          <table:table-cell table:formula="of:=CONCATENATE([$JSON.$A$1];[.$C110];[$JSON.$B$1];[.$E110];[$JSON.$C$1];[.$F110];[$JSON.$D$1];IF(ISNA([.$S110]);&quot;null&quot;;&quot;&quot;&quot;&quot;&amp;[.$S110]&amp;&quot;&quot;&quot;&quot;);[$JSON.$E$1];[.$U110];[$JSON.$F$1];IF(ISNA([.$V110]);&quot;null&quot;;&quot;&quot;&quot;&quot;&amp;[.$V110]&amp;&quot;&quot;&quot;&quot;);[$JSON.$G$1];[.$X110];[$JSON.$H$1];[.$H110];[$JSON.$I$1];[.J110];[$JSON.$J$1];[.$L110];[$JSON.$K$1];[.$O110];[$JSON.$L$1];[.$N110];[$JSON.$M$1];[.$R110];[$JSON.$N$1];[.$T110];[$JSON.$O$1];[.$W110];[$JSON.$P$1];[.$A110];[$JSON.$Q$1];[.$B110];[$JSON.$R$1])" office:value-type="string" office:string-value="{&quot;id&quot;:&quot;1-70&quot;,&quot;name&quot;:&quot;ビスマルク&quot;,&quot;kana&quot;:&quot;びすまるく&quot;,&quot;traitText&quot;:null,&quot;ruleText&quot;:&quot;ダブルプレッシャー¶アタッカーになったとき、自分の戦場のイジン1体を破壊する。&quot;,&quot;legacyText&quot;:null,&quot;imageUrl&quot;:&quot;https://one-draw.jp/ijinden/cardlist/001/card/01_070.png&quot;,&quot;expansion&quot;:15,&quot;rarity&quot;:1,&quot;type&quot;:1,&quot;level&quot;:3,&quot;color&quot;:1,&quot;term&quot;:0,&quot;trait&quot;:0,&quot;legacy&quot;:0,&quot;orderTable&quot;:109,&quot;orderDeck&quot;:68}," calcext:value-type="string">
            <text:p>{"id":"1-70","name":"ビスマルク","kana":"びすまるく","traitText":null,"ruleText":"ダブルプレッシャー¶アタッカーになったとき、自分の戦場のイジン1体を破壊する。","legacyText":null,"imageUrl":"https://one-draw.jp/ijinden/cardlist/001/card/01_070.png","expansion":15,"rarity":1,"type":1,"level":3,"color":1,"term":0,"trait":0,"legacy":0,"orderTable":109,"orderDeck":68},</text:p>
          </table:table-cell>
          <table:table-cell table:number-columns-repeated="16347"/>
        </table:table-row>
        <table:table-row table:style-name="ro2">
          <table:table-cell office:value-type="float" office:value="110" calcext:value-type="float">
            <text:p>110</text:p>
          </table:table-cell>
          <table:table-cell office:value-type="float" office:value="3" calcext:value-type="float">
            <text:p>3</text:p>
          </table:table-cell>
          <table:table-cell office:value-type="string" calcext:value-type="string">
            <text:p>1-71</text:p>
          </table:table-cell>
          <table:table-cell office:value-type="float" office:value="71" calcext:value-type="float">
            <text:p>71</text:p>
          </table:table-cell>
          <table:table-cell office:value-type="string" calcext:value-type="string">
            <text:p>ミュンツァー</text:p>
          </table:table-cell>
          <table:table-cell office:value-type="string" calcext:value-type="string">
            <text:p>みゅんつぁー</text:p>
          </table:table-cell>
          <table:table-cell office:value-type="string" calcext:value-type="string">
            <text:p>第１弾ブースターパック</text:p>
          </table:table-cell>
          <table:table-cell table:formula="of:=VLOOKUP([.G111];[$収録番号.$A$1:$収録番号.$B$9];2;0)" office:value-type="float" office:value="15" calcext:value-type="float">
            <text:p>15</text:p>
          </table:table-cell>
          <table:table-cell office:value-type="string" calcext:value-type="string">
            <text:p>N</text:p>
          </table:table-cell>
          <table:table-cell table:formula="of:=VLOOKUP([.I111];[$レアリティ番号.$A$1:$レアリティ番号.$B$4];2;0)" office:value-type="float" office:value="1" calcext:value-type="float">
            <text:p>1</text:p>
          </table:table-cell>
          <table:table-cell office:value-type="string" calcext:value-type="string">
            <text:p>イジン</text:p>
          </table:table-cell>
          <table:table-cell table:formula="of:=VLOOKUP([.K111];[$種類番号.$A$1:$種類番号.$B$4];2;0)" office:value-type="float" office:value="1" calcext:value-type="float">
            <text:p>1</text:p>
          </table:table-cell>
          <table:table-cell office:value-type="string" calcext:value-type="string">
            <text:p>赤</text:p>
          </table:table-cell>
          <table:table-cell table:formula="of:=VLOOKUP([.M111];[$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1];[$特性番号.$A$1:$特性番号.$B$8];2;0);0)" office:value-type="float" office:value="0" calcext:value-type="float">
            <text:p>0</text:p>
          </table:table-cell>
          <table:table-cell office:value-type="string" calcext:value-type="string">
            <text:p>アタッカーになったとき、自分の手札のマホウ1つを見せて発動できる。このターンの間「パワー5000以上のイジンにブロックされない」を得る。</text:p>
          </table:table-cell>
          <table:table-cell table:style-name="ce8" office:value-type="string" calcext:value-type="string">
            <text:p>1ドローする</text:p>
          </table:table-cell>
          <table:table-cell table:formula="of:=IFERROR(VLOOKUP([.$V111];[$遺業能力番号.$A$1:$遺業能力番号.$B$9];2;0);0)" office:value-type="float" office:value="4" calcext:value-type="float">
            <text:p>4</text:p>
          </table:table-cell>
          <table:table-cell office:value-type="string" calcext:value-type="string">
            <text:p>https://one-draw.jp/ijinden/cardlist/001/card/01_071.png</text:p>
          </table:table-cell>
          <table:table-cell table:formula="of:=CONCATENATE([$JSON.$A$1];[.$C111];[$JSON.$B$1];[.$E111];[$JSON.$C$1];[.$F111];[$JSON.$D$1];IF(ISNA([.$S111]);&quot;null&quot;;&quot;&quot;&quot;&quot;&amp;[.$S111]&amp;&quot;&quot;&quot;&quot;);[$JSON.$E$1];[.$U111];[$JSON.$F$1];IF(ISNA([.$V111]);&quot;null&quot;;&quot;&quot;&quot;&quot;&amp;[.$V111]&amp;&quot;&quot;&quot;&quot;);[$JSON.$G$1];[.$X111];[$JSON.$H$1];[.$H111];[$JSON.$I$1];[.J111];[$JSON.$J$1];[.$L111];[$JSON.$K$1];[.$O111];[$JSON.$L$1];[.$N111];[$JSON.$M$1];[.$R111];[$JSON.$N$1];[.$T111];[$JSON.$O$1];[.$W111];[$JSON.$P$1];[.$A111];[$JSON.$Q$1];[.$B111];[$JSON.$R$1])" office:value-type="string" office:string-value="{&quot;id&quot;:&quot;1-71&quot;,&quot;name&quot;:&quot;ミュンツァー&quot;,&quot;kana&quot;:&quot;みゅんつぁー&quot;,&quot;traitText&quot;:null,&quot;ruleText&quot;:&quot;アタッカーになったとき、自分の手札のマホウ1つを見せて発動できる。このターンの間「パワー5000以上のイジンにブロックされない」を得る。&quot;,&quot;legacyText&quot;:&quot;1ドローする&quot;,&quot;imageUrl&quot;:&quot;https://one-draw.jp/ijinden/cardlist/001/card/01_071.png&quot;,&quot;expansion&quot;:15,&quot;rarity&quot;:1,&quot;type&quot;:1,&quot;level&quot;:1,&quot;color&quot;:1,&quot;term&quot;:0,&quot;trait&quot;:0,&quot;legacy&quot;:4,&quot;orderTable&quot;:110,&quot;orderDeck&quot;:3}," calcext:value-type="string">
            <text:p>{"id":"1-71","name":"ミュンツァー","kana":"みゅんつぁー","traitText":null,"ruleText":"アタッカーになったとき、自分の手札のマホウ1つを見せて発動できる。このターンの間「パワー5000以上のイジンにブロックされない」を得る。","legacyText":"1ドローする","imageUrl":"https://one-draw.jp/ijinden/cardlist/001/card/01_071.png","expansion":15,"rarity":1,"type":1,"level":1,"color":1,"term":0,"trait":0,"legacy":4,"orderTable":110,"orderDeck":3},</text:p>
          </table:table-cell>
          <table:table-cell table:number-columns-repeated="16347"/>
        </table:table-row>
        <table:table-row table:style-name="ro2">
          <table:table-cell office:value-type="float" office:value="111" calcext:value-type="float">
            <text:p>111</text:p>
          </table:table-cell>
          <table:table-cell office:value-type="float" office:value="27" calcext:value-type="float">
            <text:p>27</text:p>
          </table:table-cell>
          <table:table-cell office:value-type="string" calcext:value-type="string">
            <text:p>1-72</text:p>
          </table:table-cell>
          <table:table-cell office:value-type="float" office:value="72" calcext:value-type="float">
            <text:p>72</text:p>
          </table:table-cell>
          <table:table-cell office:value-type="string" calcext:value-type="string">
            <text:p>大江広元</text:p>
          </table:table-cell>
          <table:table-cell office:value-type="string" calcext:value-type="string">
            <text:p>おおえのひろもと</text:p>
          </table:table-cell>
          <table:table-cell office:value-type="string" calcext:value-type="string">
            <text:p>第１弾ブースターパック</text:p>
          </table:table-cell>
          <table:table-cell table:formula="of:=VLOOKUP([.G112];[$収録番号.$A$1:$収録番号.$B$9];2;0)" office:value-type="float" office:value="15" calcext:value-type="float">
            <text:p>15</text:p>
          </table:table-cell>
          <table:table-cell office:value-type="string" calcext:value-type="string">
            <text:p>N</text:p>
          </table:table-cell>
          <table:table-cell table:formula="of:=VLOOKUP([.I112];[$レアリティ番号.$A$1:$レアリティ番号.$B$4];2;0)" office:value-type="float" office:value="1" calcext:value-type="float">
            <text:p>1</text:p>
          </table:table-cell>
          <table:table-cell office:value-type="string" calcext:value-type="string">
            <text:p>イジン</text:p>
          </table:table-cell>
          <table:table-cell table:formula="of:=VLOOKUP([.K112];[$種類番号.$A$1:$種類番号.$B$4];2;0)" office:value-type="float" office:value="1" calcext:value-type="float">
            <text:p>1</text:p>
          </table:table-cell>
          <table:table-cell office:value-type="string" calcext:value-type="string">
            <text:p>赤</text:p>
          </table:table-cell>
          <table:table-cell table:formula="of:=VLOOKUP([.M112];[$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2];[$特性番号.$A$1:$特性番号.$B$8];2;0);0)" office:value-type="float" office:value="0" calcext:value-type="float">
            <text:p>0</text:p>
          </table:table-cell>
          <table:table-cell office:value-type="string" calcext:value-type="string">
            <text:p>相手の戦場のイジンが破壊されるたび、1ドローする。</text:p>
          </table:table-cell>
          <table:table-cell table:style-name="ce8" office:value-type="string" calcext:value-type="string">
            <text:p>1ドローする</text:p>
          </table:table-cell>
          <table:table-cell table:formula="of:=IFERROR(VLOOKUP([.$V112];[$遺業能力番号.$A$1:$遺業能力番号.$B$9];2;0);0)" office:value-type="float" office:value="4" calcext:value-type="float">
            <text:p>4</text:p>
          </table:table-cell>
          <table:table-cell office:value-type="string" calcext:value-type="string">
            <text:p>https://one-draw.jp/ijinden/cardlist/001/card/01_072.png</text:p>
          </table:table-cell>
          <table:table-cell table:formula="of:=CONCATENATE([$JSON.$A$1];[.$C112];[$JSON.$B$1];[.$E112];[$JSON.$C$1];[.$F112];[$JSON.$D$1];IF(ISNA([.$S112]);&quot;null&quot;;&quot;&quot;&quot;&quot;&amp;[.$S112]&amp;&quot;&quot;&quot;&quot;);[$JSON.$E$1];[.$U112];[$JSON.$F$1];IF(ISNA([.$V112]);&quot;null&quot;;&quot;&quot;&quot;&quot;&amp;[.$V112]&amp;&quot;&quot;&quot;&quot;);[$JSON.$G$1];[.$X112];[$JSON.$H$1];[.$H112];[$JSON.$I$1];[.J112];[$JSON.$J$1];[.$L112];[$JSON.$K$1];[.$O112];[$JSON.$L$1];[.$N112];[$JSON.$M$1];[.$R112];[$JSON.$N$1];[.$T112];[$JSON.$O$1];[.$W112];[$JSON.$P$1];[.$A112];[$JSON.$Q$1];[.$B112];[$JSON.$R$1])" office:value-type="string" office:string-value="{&quot;id&quot;:&quot;1-72&quot;,&quot;name&quot;:&quot;大江広元&quot;,&quot;kana&quot;:&quot;おおえのひろもと&quot;,&quot;traitText&quot;:null,&quot;ruleText&quot;:&quot;相手の戦場のイジンが破壊されるたび、1ドローする。&quot;,&quot;legacyText&quot;:&quot;1ドローする&quot;,&quot;imageUrl&quot;:&quot;https://one-draw.jp/ijinden/cardlist/001/card/01_072.png&quot;,&quot;expansion&quot;:15,&quot;rarity&quot;:1,&quot;type&quot;:1,&quot;level&quot;:2,&quot;color&quot;:1,&quot;term&quot;:0,&quot;trait&quot;:0,&quot;legacy&quot;:4,&quot;orderTable&quot;:111,&quot;orderDeck&quot;:27}," calcext:value-type="string">
            <text:p>{"id":"1-72","name":"大江広元","kana":"おおえのひろもと","traitText":null,"ruleText":"相手の戦場のイジンが破壊されるたび、1ドローする。","legacyText":"1ドローする","imageUrl":"https://one-draw.jp/ijinden/cardlist/001/card/01_072.png","expansion":15,"rarity":1,"type":1,"level":2,"color":1,"term":0,"trait":0,"legacy":4,"orderTable":111,"orderDeck":27},</text:p>
          </table:table-cell>
          <table:table-cell table:number-columns-repeated="16347"/>
        </table:table-row>
        <table:table-row table:style-name="ro2">
          <table:table-cell office:value-type="float" office:value="112" calcext:value-type="float">
            <text:p>112</text:p>
          </table:table-cell>
          <table:table-cell office:value-type="float" office:value="117" calcext:value-type="float">
            <text:p>117</text:p>
          </table:table-cell>
          <table:table-cell office:value-type="string" calcext:value-type="string">
            <text:p>1-73</text:p>
          </table:table-cell>
          <table:table-cell office:value-type="float" office:value="73" calcext:value-type="float">
            <text:p>73</text:p>
          </table:table-cell>
          <table:table-cell office:value-type="string" calcext:value-type="string">
            <text:p>グスタフ2世アドルフ</text:p>
          </table:table-cell>
          <table:table-cell office:value-type="string" calcext:value-type="string">
            <text:p>ぐすたふにせいあどるふ</text:p>
          </table:table-cell>
          <table:table-cell office:value-type="string" calcext:value-type="string">
            <text:p>第１弾ブースターパック</text:p>
          </table:table-cell>
          <table:table-cell table:formula="of:=VLOOKUP([.G113];[$収録番号.$A$1:$収録番号.$B$9];2;0)" office:value-type="float" office:value="15" calcext:value-type="float">
            <text:p>15</text:p>
          </table:table-cell>
          <table:table-cell office:value-type="string" calcext:value-type="string">
            <text:p>N</text:p>
          </table:table-cell>
          <table:table-cell table:formula="of:=VLOOKUP([.I113];[$レアリティ番号.$A$1:$レアリティ番号.$B$4];2;0)" office:value-type="float" office:value="1" calcext:value-type="float">
            <text:p>1</text:p>
          </table:table-cell>
          <table:table-cell office:value-type="string" calcext:value-type="string">
            <text:p>イジン</text:p>
          </table:table-cell>
          <table:table-cell table:formula="of:=VLOOKUP([.K113];[$種類番号.$A$1:$種類番号.$B$4];2;0)" office:value-type="float" office:value="1" calcext:value-type="float">
            <text:p>1</text:p>
          </table:table-cell>
          <table:table-cell office:value-type="string" calcext:value-type="string">
            <text:p>青</text:p>
          </table:table-cell>
          <table:table-cell table:formula="of:=VLOOKUP([.M113];[$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3];[$特性番号.$A$1:$特性番号.$B$8];2;0);0)" office:value-type="float" office:value="0" calcext:value-type="float">
            <text:p>0</text:p>
          </table:table-cell>
          <table:table-cell office:value-type="string" calcext:value-type="string">
            <text:p>イジンが相手の戦場に置かれる際、そのイジンは寝ている状態で戦場に置かれる。¶ブロック+2000</text:p>
          </table:table-cell>
          <table:table-cell table:style-name="ce8" office:value-type="string" calcext:value-type="string">
            <text:p>1ドローする</text:p>
          </table:table-cell>
          <table:table-cell table:formula="of:=IFERROR(VLOOKUP([.$V113];[$遺業能力番号.$A$1:$遺業能力番号.$B$9];2;0);0)" office:value-type="float" office:value="4" calcext:value-type="float">
            <text:p>4</text:p>
          </table:table-cell>
          <table:table-cell office:value-type="string" calcext:value-type="string">
            <text:p>https://one-draw.jp/ijinden/cardlist/001/card/01_073.png</text:p>
          </table:table-cell>
          <table:table-cell table:formula="of:=CONCATENATE([$JSON.$A$1];[.$C113];[$JSON.$B$1];[.$E113];[$JSON.$C$1];[.$F113];[$JSON.$D$1];IF(ISNA([.$S113]);&quot;null&quot;;&quot;&quot;&quot;&quot;&amp;[.$S113]&amp;&quot;&quot;&quot;&quot;);[$JSON.$E$1];[.$U113];[$JSON.$F$1];IF(ISNA([.$V113]);&quot;null&quot;;&quot;&quot;&quot;&quot;&amp;[.$V113]&amp;&quot;&quot;&quot;&quot;);[$JSON.$G$1];[.$X113];[$JSON.$H$1];[.$H113];[$JSON.$I$1];[.J113];[$JSON.$J$1];[.$L113];[$JSON.$K$1];[.$O113];[$JSON.$L$1];[.$N113];[$JSON.$M$1];[.$R113];[$JSON.$N$1];[.$T113];[$JSON.$O$1];[.$W113];[$JSON.$P$1];[.$A113];[$JSON.$Q$1];[.$B113];[$JSON.$R$1])" office:value-type="string" office:string-value="{&quot;id&quot;:&quot;1-73&quot;,&quot;name&quot;:&quot;グスタフ2世アドルフ&quot;,&quot;kana&quot;:&quot;ぐすたふにせいあどるふ&quot;,&quot;traitText&quot;:null,&quot;ruleText&quot;:&quot;イジンが相手の戦場に置かれる際、そのイジンは寝ている状態で戦場に置かれる。¶ブロック+2000&quot;,&quot;legacyText&quot;:&quot;1ドローする&quot;,&quot;imageUrl&quot;:&quot;https://one-draw.jp/ijinden/cardlist/001/card/01_073.png&quot;,&quot;expansion&quot;:15,&quot;rarity&quot;:1,&quot;type&quot;:1,&quot;level&quot;:4,&quot;color&quot;:2,&quot;term&quot;:0,&quot;trait&quot;:0,&quot;legacy&quot;:4,&quot;orderTable&quot;:112,&quot;orderDeck&quot;:117}," calcext:value-type="string">
            <text:p>{"id":"1-73","name":"グスタフ2世アドルフ","kana":"ぐすたふにせいあどるふ","traitText":null,"ruleText":"イジンが相手の戦場に置かれる際、そのイジンは寝ている状態で戦場に置かれる。¶ブロック+2000","legacyText":"1ドローする","imageUrl":"https://one-draw.jp/ijinden/cardlist/001/card/01_073.png","expansion":15,"rarity":1,"type":1,"level":4,"color":2,"term":0,"trait":0,"legacy":4,"orderTable":112,"orderDeck":117},</text:p>
          </table:table-cell>
          <table:table-cell table:number-columns-repeated="16347"/>
        </table:table-row>
        <table:table-row table:style-name="ro2">
          <table:table-cell office:value-type="float" office:value="113" calcext:value-type="float">
            <text:p>113</text:p>
          </table:table-cell>
          <table:table-cell office:value-type="float" office:value="118" calcext:value-type="float">
            <text:p>118</text:p>
          </table:table-cell>
          <table:table-cell office:value-type="string" calcext:value-type="string">
            <text:p>1-74</text:p>
          </table:table-cell>
          <table:table-cell office:value-type="float" office:value="74" calcext:value-type="float">
            <text:p>74</text:p>
          </table:table-cell>
          <table:table-cell office:value-type="string" calcext:value-type="string">
            <text:p>オリバー・クロムウェル</text:p>
          </table:table-cell>
          <table:table-cell office:value-type="string" calcext:value-type="string">
            <text:p>おりばーくろむうぇる</text:p>
          </table:table-cell>
          <table:table-cell office:value-type="string" calcext:value-type="string">
            <text:p>第１弾ブースターパック</text:p>
          </table:table-cell>
          <table:table-cell table:formula="of:=VLOOKUP([.G114];[$収録番号.$A$1:$収録番号.$B$9];2;0)" office:value-type="float" office:value="15" calcext:value-type="float">
            <text:p>15</text:p>
          </table:table-cell>
          <table:table-cell office:value-type="string" calcext:value-type="string">
            <text:p>N</text:p>
          </table:table-cell>
          <table:table-cell table:formula="of:=VLOOKUP([.I114];[$レアリティ番号.$A$1:$レアリティ番号.$B$4];2;0)" office:value-type="float" office:value="1" calcext:value-type="float">
            <text:p>1</text:p>
          </table:table-cell>
          <table:table-cell office:value-type="string" calcext:value-type="string">
            <text:p>イジン</text:p>
          </table:table-cell>
          <table:table-cell table:formula="of:=VLOOKUP([.K114];[$種類番号.$A$1:$種類番号.$B$4];2;0)" office:value-type="float" office:value="1" calcext:value-type="float">
            <text:p>1</text:p>
          </table:table-cell>
          <table:table-cell office:value-type="string" calcext:value-type="string">
            <text:p>青</text:p>
          </table:table-cell>
          <table:table-cell table:formula="of:=VLOOKUP([.M114];[$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4];[$特性番号.$A$1:$特性番号.$B$8];2;0);0)" office:value-type="float" office:value="0" calcext:value-type="float">
            <text:p>0</text:p>
          </table:table-cell>
          <table:table-cell office:value-type="string" calcext:value-type="string">
            <text:p>相手の魔力ゾーンの裏のカード1つにつき「アタック+1000」を得る。</text:p>
          </table:table-cell>
          <table:table-cell table:style-name="ce8" table:formula="of:=NA()" office:value-type="string" office:string-value="" calcext:value-type="error">
            <text:p>#N/A</text:p>
          </table:table-cell>
          <table:table-cell table:formula="of:=IFERROR(VLOOKUP([.$V114];[$遺業能力番号.$A$1:$遺業能力番号.$B$9];2;0);0)" office:value-type="float" office:value="0" calcext:value-type="float">
            <text:p>0</text:p>
          </table:table-cell>
          <table:table-cell office:value-type="string" calcext:value-type="string">
            <text:p>https://one-draw.jp/ijinden/cardlist/001/card/01_074.png</text:p>
          </table:table-cell>
          <table:table-cell table:formula="of:=CONCATENATE([$JSON.$A$1];[.$C114];[$JSON.$B$1];[.$E114];[$JSON.$C$1];[.$F114];[$JSON.$D$1];IF(ISNA([.$S114]);&quot;null&quot;;&quot;&quot;&quot;&quot;&amp;[.$S114]&amp;&quot;&quot;&quot;&quot;);[$JSON.$E$1];[.$U114];[$JSON.$F$1];IF(ISNA([.$V114]);&quot;null&quot;;&quot;&quot;&quot;&quot;&amp;[.$V114]&amp;&quot;&quot;&quot;&quot;);[$JSON.$G$1];[.$X114];[$JSON.$H$1];[.$H114];[$JSON.$I$1];[.J114];[$JSON.$J$1];[.$L114];[$JSON.$K$1];[.$O114];[$JSON.$L$1];[.$N114];[$JSON.$M$1];[.$R114];[$JSON.$N$1];[.$T114];[$JSON.$O$1];[.$W114];[$JSON.$P$1];[.$A114];[$JSON.$Q$1];[.$B114];[$JSON.$R$1])" office:value-type="string" office:string-value="{&quot;id&quot;:&quot;1-74&quot;,&quot;name&quot;:&quot;オリバー・クロムウェル&quot;,&quot;kana&quot;:&quot;おりばーくろむうぇる&quot;,&quot;traitText&quot;:null,&quot;ruleText&quot;:&quot;相手の魔力ゾーンの裏のカード1つにつき「アタック+1000」を得る。&quot;,&quot;legacyText&quot;:null,&quot;imageUrl&quot;:&quot;https://one-draw.jp/ijinden/cardlist/001/card/01_074.png&quot;,&quot;expansion&quot;:15,&quot;rarity&quot;:1,&quot;type&quot;:1,&quot;level&quot;:4,&quot;color&quot;:2,&quot;term&quot;:0,&quot;trait&quot;:0,&quot;legacy&quot;:0,&quot;orderTable&quot;:113,&quot;orderDeck&quot;:118}," calcext:value-type="string">
            <text:p>{"id":"1-74","name":"オリバー・クロムウェル","kana":"おりばーくろむうぇる","traitText":null,"ruleText":"相手の魔力ゾーンの裏のカード1つにつき「アタック+1000」を得る。","legacyText":null,"imageUrl":"https://one-draw.jp/ijinden/cardlist/001/card/01_074.png","expansion":15,"rarity":1,"type":1,"level":4,"color":2,"term":0,"trait":0,"legacy":0,"orderTable":113,"orderDeck":118},</text:p>
          </table:table-cell>
          <table:table-cell table:number-columns-repeated="16347"/>
        </table:table-row>
        <table:table-row table:style-name="ro2">
          <table:table-cell office:value-type="float" office:value="114" calcext:value-type="float">
            <text:p>114</text:p>
          </table:table-cell>
          <table:table-cell office:value-type="float" office:value="119" calcext:value-type="float">
            <text:p>119</text:p>
          </table:table-cell>
          <table:table-cell office:value-type="string" calcext:value-type="string">
            <text:p>1-75</text:p>
          </table:table-cell>
          <table:table-cell office:value-type="float" office:value="75" calcext:value-type="float">
            <text:p>75</text:p>
          </table:table-cell>
          <table:table-cell office:value-type="string" calcext:value-type="string">
            <text:p>衛青</text:p>
          </table:table-cell>
          <table:table-cell office:value-type="string" calcext:value-type="string">
            <text:p>えいせい</text:p>
          </table:table-cell>
          <table:table-cell office:value-type="string" calcext:value-type="string">
            <text:p>第１弾ブースターパック</text:p>
          </table:table-cell>
          <table:table-cell table:formula="of:=VLOOKUP([.G115];[$収録番号.$A$1:$収録番号.$B$9];2;0)" office:value-type="float" office:value="15" calcext:value-type="float">
            <text:p>15</text:p>
          </table:table-cell>
          <table:table-cell office:value-type="string" calcext:value-type="string">
            <text:p>N</text:p>
          </table:table-cell>
          <table:table-cell table:formula="of:=VLOOKUP([.I115];[$レアリティ番号.$A$1:$レアリティ番号.$B$4];2;0)" office:value-type="float" office:value="1" calcext:value-type="float">
            <text:p>1</text:p>
          </table:table-cell>
          <table:table-cell office:value-type="string" calcext:value-type="string">
            <text:p>イジン</text:p>
          </table:table-cell>
          <table:table-cell table:formula="of:=VLOOKUP([.K115];[$種類番号.$A$1:$種類番号.$B$4];2;0)" office:value-type="float" office:value="1" calcext:value-type="float">
            <text:p>1</text:p>
          </table:table-cell>
          <table:table-cell office:value-type="string" calcext:value-type="string">
            <text:p>青</text:p>
          </table:table-cell>
          <table:table-cell table:formula="of:=VLOOKUP([.M115];[$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5];[$特性番号.$A$1:$特性番号.$B$8];2;0);0)" office:value-type="float" office:value="0" calcext:value-type="float">
            <text:p>0</text:p>
          </table:table-cell>
          <table:table-cell office:value-type="string" calcext:value-type="string">
            <text:p>戦場に置かれたとき、自分の戦場のイジンが2体以下なら発動する。1ドローして、イジン召喚権+1する。</text:p>
          </table:table-cell>
          <table:table-cell table:style-name="ce8" office:value-type="string" calcext:value-type="string">
            <text:p>1ドローする</text:p>
          </table:table-cell>
          <table:table-cell table:formula="of:=IFERROR(VLOOKUP([.$V115];[$遺業能力番号.$A$1:$遺業能力番号.$B$9];2;0);0)" office:value-type="float" office:value="4" calcext:value-type="float">
            <text:p>4</text:p>
          </table:table-cell>
          <table:table-cell office:value-type="string" calcext:value-type="string">
            <text:p>https://one-draw.jp/ijinden/cardlist/001/card/01_075.png</text:p>
          </table:table-cell>
          <table:table-cell table:formula="of:=CONCATENATE([$JSON.$A$1];[.$C115];[$JSON.$B$1];[.$E115];[$JSON.$C$1];[.$F115];[$JSON.$D$1];IF(ISNA([.$S115]);&quot;null&quot;;&quot;&quot;&quot;&quot;&amp;[.$S115]&amp;&quot;&quot;&quot;&quot;);[$JSON.$E$1];[.$U115];[$JSON.$F$1];IF(ISNA([.$V115]);&quot;null&quot;;&quot;&quot;&quot;&quot;&amp;[.$V115]&amp;&quot;&quot;&quot;&quot;);[$JSON.$G$1];[.$X115];[$JSON.$H$1];[.$H115];[$JSON.$I$1];[.J115];[$JSON.$J$1];[.$L115];[$JSON.$K$1];[.$O115];[$JSON.$L$1];[.$N115];[$JSON.$M$1];[.$R115];[$JSON.$N$1];[.$T115];[$JSON.$O$1];[.$W115];[$JSON.$P$1];[.$A115];[$JSON.$Q$1];[.$B115];[$JSON.$R$1])" office:value-type="string" office:string-value="{&quot;id&quot;:&quot;1-75&quot;,&quot;name&quot;:&quot;衛青&quot;,&quot;kana&quot;:&quot;えいせい&quot;,&quot;traitText&quot;:null,&quot;ruleText&quot;:&quot;戦場に置かれたとき、自分の戦場のイジンが2体以下なら発動する。1ドローして、イジン召喚権+1する。&quot;,&quot;legacyText&quot;:&quot;1ドローする&quot;,&quot;imageUrl&quot;:&quot;https://one-draw.jp/ijinden/cardlist/001/card/01_075.png&quot;,&quot;expansion&quot;:15,&quot;rarity&quot;:1,&quot;type&quot;:1,&quot;level&quot;:4,&quot;color&quot;:2,&quot;term&quot;:0,&quot;trait&quot;:0,&quot;legacy&quot;:4,&quot;orderTable&quot;:114,&quot;orderDeck&quot;:119}," calcext:value-type="string">
            <text:p>{"id":"1-75","name":"衛青","kana":"えいせい","traitText":null,"ruleText":"戦場に置かれたとき、自分の戦場のイジンが2体以下なら発動する。1ドローして、イジン召喚権+1する。","legacyText":"1ドローする","imageUrl":"https://one-draw.jp/ijinden/cardlist/001/card/01_075.png","expansion":15,"rarity":1,"type":1,"level":4,"color":2,"term":0,"trait":0,"legacy":4,"orderTable":114,"orderDeck":119},</text:p>
          </table:table-cell>
          <table:table-cell table:number-columns-repeated="16347"/>
        </table:table-row>
        <table:table-row table:style-name="ro2">
          <table:table-cell office:value-type="float" office:value="115" calcext:value-type="float">
            <text:p>115</text:p>
          </table:table-cell>
          <table:table-cell office:value-type="float" office:value="166" calcext:value-type="float">
            <text:p>166</text:p>
          </table:table-cell>
          <table:table-cell office:value-type="string" calcext:value-type="string">
            <text:p>1-76</text:p>
          </table:table-cell>
          <table:table-cell office:value-type="float" office:value="76" calcext:value-type="float">
            <text:p>76</text:p>
          </table:table-cell>
          <table:table-cell office:value-type="string" calcext:value-type="string">
            <text:p>シーボルト</text:p>
          </table:table-cell>
          <table:table-cell office:value-type="string" calcext:value-type="string">
            <text:p>しーぼると</text:p>
          </table:table-cell>
          <table:table-cell office:value-type="string" calcext:value-type="string">
            <text:p>第１弾ブースターパック</text:p>
          </table:table-cell>
          <table:table-cell table:formula="of:=VLOOKUP([.G116];[$収録番号.$A$1:$収録番号.$B$9];2;0)" office:value-type="float" office:value="15" calcext:value-type="float">
            <text:p>15</text:p>
          </table:table-cell>
          <table:table-cell office:value-type="string" calcext:value-type="string">
            <text:p>N</text:p>
          </table:table-cell>
          <table:table-cell table:formula="of:=VLOOKUP([.I116];[$レアリティ番号.$A$1:$レアリティ番号.$B$4];2;0)" office:value-type="float" office:value="1" calcext:value-type="float">
            <text:p>1</text:p>
          </table:table-cell>
          <table:table-cell office:value-type="string" calcext:value-type="string">
            <text:p>イジン</text:p>
          </table:table-cell>
          <table:table-cell table:formula="of:=VLOOKUP([.K116];[$種類番号.$A$1:$種類番号.$B$4];2;0)" office:value-type="float" office:value="1" calcext:value-type="float">
            <text:p>1</text:p>
          </table:table-cell>
          <table:table-cell office:value-type="string" calcext:value-type="string">
            <text:p>緑</text:p>
          </table:table-cell>
          <table:table-cell table:formula="of:=VLOOKUP([.M116];[$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6];[$特性番号.$A$1:$特性番号.$B$8];2;0);0)" office:value-type="float" office:value="0" calcext:value-type="float">
            <text:p>0</text:p>
          </table:table-cell>
          <table:table-cell office:value-type="string" calcext:value-type="string">
            <text:p>自分の墓地の「美術」カード1つにつき「パワー+1000」を得る。¶パワー7000以上の間「アタッカーになったとき、これを起こす」を得る。</text:p>
          </table:table-cell>
          <table:table-cell table:style-name="ce8" table:formula="of:=NA()" office:value-type="string" office:string-value="" calcext:value-type="error">
            <text:p>#N/A</text:p>
          </table:table-cell>
          <table:table-cell table:formula="of:=IFERROR(VLOOKUP([.$V116];[$遺業能力番号.$A$1:$遺業能力番号.$B$9];2;0);0)" office:value-type="float" office:value="0" calcext:value-type="float">
            <text:p>0</text:p>
          </table:table-cell>
          <table:table-cell office:value-type="string" calcext:value-type="string">
            <text:p>https://one-draw.jp/ijinden/cardlist/001/card/01_076.png</text:p>
          </table:table-cell>
          <table:table-cell table:formula="of:=CONCATENATE([$JSON.$A$1];[.$C116];[$JSON.$B$1];[.$E116];[$JSON.$C$1];[.$F116];[$JSON.$D$1];IF(ISNA([.$S116]);&quot;null&quot;;&quot;&quot;&quot;&quot;&amp;[.$S116]&amp;&quot;&quot;&quot;&quot;);[$JSON.$E$1];[.$U116];[$JSON.$F$1];IF(ISNA([.$V116]);&quot;null&quot;;&quot;&quot;&quot;&quot;&amp;[.$V116]&amp;&quot;&quot;&quot;&quot;);[$JSON.$G$1];[.$X116];[$JSON.$H$1];[.$H116];[$JSON.$I$1];[.J116];[$JSON.$J$1];[.$L116];[$JSON.$K$1];[.$O116];[$JSON.$L$1];[.$N116];[$JSON.$M$1];[.$R116];[$JSON.$N$1];[.$T116];[$JSON.$O$1];[.$W116];[$JSON.$P$1];[.$A116];[$JSON.$Q$1];[.$B116];[$JSON.$R$1])" office:value-type="string" office:string-value="{&quot;id&quot;:&quot;1-76&quot;,&quot;name&quot;:&quot;シーボルト&quot;,&quot;kana&quot;:&quot;しーぼると&quot;,&quot;traitText&quot;:null,&quot;ruleText&quot;:&quot;自分の墓地の「美術」カード1つにつき「パワー+1000」を得る。¶パワー7000以上の間「アタッカーになったとき、これを起こす」を得る。&quot;,&quot;legacyText&quot;:null,&quot;imageUrl&quot;:&quot;https://one-draw.jp/ijinden/cardlist/001/card/01_076.png&quot;,&quot;expansion&quot;:15,&quot;rarity&quot;:1,&quot;type&quot;:1,&quot;level&quot;:5,&quot;color&quot;:4,&quot;term&quot;:0,&quot;trait&quot;:0,&quot;legacy&quot;:0,&quot;orderTable&quot;:115,&quot;orderDeck&quot;:166}," calcext:value-type="string">
            <text:p>{"id":"1-76","name":"シーボルト","kana":"しーぼると","traitText":null,"ruleText":"自分の墓地の「美術」カード1つにつき「パワー+1000」を得る。¶パワー7000以上の間「アタッカーになったとき、これを起こす」を得る。","legacyText":null,"imageUrl":"https://one-draw.jp/ijinden/cardlist/001/card/01_076.png","expansion":15,"rarity":1,"type":1,"level":5,"color":4,"term":0,"trait":0,"legacy":0,"orderTable":115,"orderDeck":166},</text:p>
          </table:table-cell>
          <table:table-cell table:number-columns-repeated="16347"/>
        </table:table-row>
        <table:table-row table:style-name="ro2">
          <table:table-cell office:value-type="float" office:value="116" calcext:value-type="float">
            <text:p>116</text:p>
          </table:table-cell>
          <table:table-cell office:value-type="float" office:value="46" calcext:value-type="float">
            <text:p>46</text:p>
          </table:table-cell>
          <table:table-cell office:value-type="string" calcext:value-type="string">
            <text:p>1-77</text:p>
          </table:table-cell>
          <table:table-cell office:value-type="float" office:value="77" calcext:value-type="float">
            <text:p>77</text:p>
          </table:table-cell>
          <table:table-cell office:value-type="string" calcext:value-type="string">
            <text:p>乾隆帝</text:p>
          </table:table-cell>
          <table:table-cell office:value-type="string" calcext:value-type="string">
            <text:p>けんりゅうてい</text:p>
          </table:table-cell>
          <table:table-cell office:value-type="string" calcext:value-type="string">
            <text:p>第１弾ブースターパック</text:p>
          </table:table-cell>
          <table:table-cell table:formula="of:=VLOOKUP([.G117];[$収録番号.$A$1:$収録番号.$B$9];2;0)" office:value-type="float" office:value="15" calcext:value-type="float">
            <text:p>15</text:p>
          </table:table-cell>
          <table:table-cell office:value-type="string" calcext:value-type="string">
            <text:p>N</text:p>
          </table:table-cell>
          <table:table-cell table:formula="of:=VLOOKUP([.I117];[$レアリティ番号.$A$1:$レアリティ番号.$B$4];2;0)" office:value-type="float" office:value="1" calcext:value-type="float">
            <text:p>1</text:p>
          </table:table-cell>
          <table:table-cell office:value-type="string" calcext:value-type="string">
            <text:p>イジン</text:p>
          </table:table-cell>
          <table:table-cell table:formula="of:=VLOOKUP([.K117];[$種類番号.$A$1:$種類番号.$B$4];2;0)" office:value-type="float" office:value="1" calcext:value-type="float">
            <text:p>1</text:p>
          </table:table-cell>
          <table:table-cell office:value-type="string" calcext:value-type="string">
            <text:p>緑</text:p>
          </table:table-cell>
          <table:table-cell table:formula="of:=VLOOKUP([.M117];[$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7];[$特性番号.$A$1:$特性番号.$B$8];2;0);0)" office:value-type="float" office:value="0" calcext:value-type="float">
            <text:p>0</text:p>
          </table:table-cell>
          <table:table-cell/>
          <table:table-cell table:style-name="ce8" table:formula="of:=NA()" office:value-type="string" office:string-value="" calcext:value-type="error">
            <text:p>#N/A</text:p>
          </table:table-cell>
          <table:table-cell table:formula="of:=IFERROR(VLOOKUP([.$V117];[$遺業能力番号.$A$1:$遺業能力番号.$B$9];2;0);0)" office:value-type="float" office:value="0" calcext:value-type="float">
            <text:p>0</text:p>
          </table:table-cell>
          <table:table-cell office:value-type="string" calcext:value-type="string">
            <text:p>https://one-draw.jp/ijinden/cardlist/001/card/01_077.png</text:p>
          </table:table-cell>
          <table:table-cell table:formula="of:=CONCATENATE([$JSON.$A$1];[.$C117];[$JSON.$B$1];[.$E117];[$JSON.$C$1];[.$F117];[$JSON.$D$1];IF(ISNA([.$S117]);&quot;null&quot;;&quot;&quot;&quot;&quot;&amp;[.$S117]&amp;&quot;&quot;&quot;&quot;);[$JSON.$E$1];[.$U117];[$JSON.$F$1];IF(ISNA([.$V117]);&quot;null&quot;;&quot;&quot;&quot;&quot;&amp;[.$V117]&amp;&quot;&quot;&quot;&quot;);[$JSON.$G$1];[.$X117];[$JSON.$H$1];[.$H117];[$JSON.$I$1];[.J117];[$JSON.$J$1];[.$L117];[$JSON.$K$1];[.$O117];[$JSON.$L$1];[.$N117];[$JSON.$M$1];[.$R117];[$JSON.$N$1];[.$T117];[$JSON.$O$1];[.$W117];[$JSON.$P$1];[.$A117];[$JSON.$Q$1];[.$B117];[$JSON.$R$1])" office:value-type="string" office:string-value="{&quot;id&quot;:&quot;1-77&quot;,&quot;name&quot;:&quot;乾隆帝&quot;,&quot;kana&quot;:&quot;けんりゅうてい&quot;,&quot;traitText&quot;:null,&quot;ruleText&quot;:&quot;&quot;,&quot;legacyText&quot;:null,&quot;imageUrl&quot;:&quot;https://one-draw.jp/ijinden/cardlist/001/card/01_077.png&quot;,&quot;expansion&quot;:15,&quot;rarity&quot;:1,&quot;type&quot;:1,&quot;level&quot;:2,&quot;color&quot;:4,&quot;term&quot;:0,&quot;trait&quot;:0,&quot;legacy&quot;:0,&quot;orderTable&quot;:116,&quot;orderDeck&quot;:46}," calcext:value-type="string">
            <text:p>{"id":"1-77","name":"乾隆帝","kana":"けんりゅうてい","traitText":null,"ruleText":"","legacyText":null,"imageUrl":"https://one-draw.jp/ijinden/cardlist/001/card/01_077.png","expansion":15,"rarity":1,"type":1,"level":2,"color":4,"term":0,"trait":0,"legacy":0,"orderTable":116,"orderDeck":46},</text:p>
          </table:table-cell>
          <table:table-cell table:number-columns-repeated="16347"/>
        </table:table-row>
        <table:table-row table:style-name="ro2">
          <table:table-cell office:value-type="float" office:value="117" calcext:value-type="float">
            <text:p>117</text:p>
          </table:table-cell>
          <table:table-cell office:value-type="float" office:value="88" calcext:value-type="float">
            <text:p>88</text:p>
          </table:table-cell>
          <table:table-cell office:value-type="string" calcext:value-type="string">
            <text:p>1-78</text:p>
          </table:table-cell>
          <table:table-cell office:value-type="float" office:value="78" calcext:value-type="float">
            <text:p>78</text:p>
          </table:table-cell>
          <table:table-cell office:value-type="string" calcext:value-type="string">
            <text:p>小野好古</text:p>
          </table:table-cell>
          <table:table-cell office:value-type="string" calcext:value-type="string">
            <text:p>おののよしふる</text:p>
          </table:table-cell>
          <table:table-cell office:value-type="string" calcext:value-type="string">
            <text:p>第１弾ブースターパック</text:p>
          </table:table-cell>
          <table:table-cell table:formula="of:=VLOOKUP([.G118];[$収録番号.$A$1:$収録番号.$B$9];2;0)" office:value-type="float" office:value="15" calcext:value-type="float">
            <text:p>15</text:p>
          </table:table-cell>
          <table:table-cell office:value-type="string" calcext:value-type="string">
            <text:p>N</text:p>
          </table:table-cell>
          <table:table-cell table:formula="of:=VLOOKUP([.I118];[$レアリティ番号.$A$1:$レアリティ番号.$B$4];2;0)" office:value-type="float" office:value="1" calcext:value-type="float">
            <text:p>1</text:p>
          </table:table-cell>
          <table:table-cell office:value-type="string" calcext:value-type="string">
            <text:p>イジン</text:p>
          </table:table-cell>
          <table:table-cell table:formula="of:=VLOOKUP([.K118];[$種類番号.$A$1:$種類番号.$B$4];2;0)" office:value-type="float" office:value="1" calcext:value-type="float">
            <text:p>1</text:p>
          </table:table-cell>
          <table:table-cell office:value-type="string" calcext:value-type="string">
            <text:p>緑</text:p>
          </table:table-cell>
          <table:table-cell table:formula="of:=VLOOKUP([.M118];[$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8];[$特性番号.$A$1:$特性番号.$B$8];2;0);0)" office:value-type="float" office:value="0" calcext:value-type="float">
            <text:p>0</text:p>
          </table:table-cell>
          <table:table-cell office:value-type="string" calcext:value-type="string">
            <text:p>戦場に置かれたとき、自分の手札のハイケイ1つを見せて発動できる。1ドローする。</text:p>
          </table:table-cell>
          <table:table-cell table:style-name="ce8" office:value-type="string" calcext:value-type="string">
            <text:p>1ドローする</text:p>
          </table:table-cell>
          <table:table-cell table:formula="of:=IFERROR(VLOOKUP([.$V118];[$遺業能力番号.$A$1:$遺業能力番号.$B$9];2;0);0)" office:value-type="float" office:value="4" calcext:value-type="float">
            <text:p>4</text:p>
          </table:table-cell>
          <table:table-cell office:value-type="string" calcext:value-type="string">
            <text:p>https://one-draw.jp/ijinden/cardlist/001/card/01_078.png</text:p>
          </table:table-cell>
          <table:table-cell table:formula="of:=CONCATENATE([$JSON.$A$1];[.$C118];[$JSON.$B$1];[.$E118];[$JSON.$C$1];[.$F118];[$JSON.$D$1];IF(ISNA([.$S118]);&quot;null&quot;;&quot;&quot;&quot;&quot;&amp;[.$S118]&amp;&quot;&quot;&quot;&quot;);[$JSON.$E$1];[.$U118];[$JSON.$F$1];IF(ISNA([.$V118]);&quot;null&quot;;&quot;&quot;&quot;&quot;&amp;[.$V118]&amp;&quot;&quot;&quot;&quot;);[$JSON.$G$1];[.$X118];[$JSON.$H$1];[.$H118];[$JSON.$I$1];[.J118];[$JSON.$J$1];[.$L118];[$JSON.$K$1];[.$O118];[$JSON.$L$1];[.$N118];[$JSON.$M$1];[.$R118];[$JSON.$N$1];[.$T118];[$JSON.$O$1];[.$W118];[$JSON.$P$1];[.$A118];[$JSON.$Q$1];[.$B118];[$JSON.$R$1])" office:value-type="string" office:string-value="{&quot;id&quot;:&quot;1-78&quot;,&quot;name&quot;:&quot;小野好古&quot;,&quot;kana&quot;:&quot;おののよしふる&quot;,&quot;traitText&quot;:null,&quot;ruleText&quot;:&quot;戦場に置かれたとき、自分の手札のハイケイ1つを見せて発動できる。1ドローする。&quot;,&quot;legacyText&quot;:&quot;1ドローする&quot;,&quot;imageUrl&quot;:&quot;https://one-draw.jp/ijinden/cardlist/001/card/01_078.png&quot;,&quot;expansion&quot;:15,&quot;rarity&quot;:1,&quot;type&quot;:1,&quot;level&quot;:3,&quot;color&quot;:4,&quot;term&quot;:0,&quot;trait&quot;:0,&quot;legacy&quot;:4,&quot;orderTable&quot;:117,&quot;orderDeck&quot;:88}," calcext:value-type="string">
            <text:p>{"id":"1-78","name":"小野好古","kana":"おののよしふる","traitText":null,"ruleText":"戦場に置かれたとき、自分の手札のハイケイ1つを見せて発動できる。1ドローする。","legacyText":"1ドローする","imageUrl":"https://one-draw.jp/ijinden/cardlist/001/card/01_078.png","expansion":15,"rarity":1,"type":1,"level":3,"color":4,"term":0,"trait":0,"legacy":4,"orderTable":117,"orderDeck":88},</text:p>
          </table:table-cell>
          <table:table-cell table:number-columns-repeated="16347"/>
        </table:table-row>
        <table:table-row table:style-name="ro2">
          <table:table-cell office:value-type="float" office:value="118" calcext:value-type="float">
            <text:p>118</text:p>
          </table:table-cell>
          <table:table-cell office:value-type="float" office:value="167" calcext:value-type="float">
            <text:p>167</text:p>
          </table:table-cell>
          <table:table-cell office:value-type="string" calcext:value-type="string">
            <text:p>1-79</text:p>
          </table:table-cell>
          <table:table-cell office:value-type="float" office:value="79" calcext:value-type="float">
            <text:p>79</text:p>
          </table:table-cell>
          <table:table-cell office:value-type="string" calcext:value-type="string">
            <text:p>アレッサンドロ・ヴァリニャーノ</text:p>
          </table:table-cell>
          <table:table-cell office:value-type="string" calcext:value-type="string">
            <text:p>あれっさんどろゔぁりにゃーの</text:p>
          </table:table-cell>
          <table:table-cell office:value-type="string" calcext:value-type="string">
            <text:p>第１弾ブースターパック</text:p>
          </table:table-cell>
          <table:table-cell table:formula="of:=VLOOKUP([.G119];[$収録番号.$A$1:$収録番号.$B$9];2;0)" office:value-type="float" office:value="15" calcext:value-type="float">
            <text:p>15</text:p>
          </table:table-cell>
          <table:table-cell office:value-type="string" calcext:value-type="string">
            <text:p>N</text:p>
          </table:table-cell>
          <table:table-cell table:formula="of:=VLOOKUP([.I119];[$レアリティ番号.$A$1:$レアリティ番号.$B$4];2;0)" office:value-type="float" office:value="1" calcext:value-type="float">
            <text:p>1</text:p>
          </table:table-cell>
          <table:table-cell office:value-type="string" calcext:value-type="string">
            <text:p>イジン</text:p>
          </table:table-cell>
          <table:table-cell table:formula="of:=VLOOKUP([.K119];[$種類番号.$A$1:$種類番号.$B$4];2;0)" office:value-type="float" office:value="1" calcext:value-type="float">
            <text:p>1</text:p>
          </table:table-cell>
          <table:table-cell office:value-type="string" calcext:value-type="string">
            <text:p>緑</text:p>
          </table:table-cell>
          <table:table-cell table:formula="of:=VLOOKUP([.M119];[$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航海</text:p>
          </table:table-cell>
          <table:table-cell table:formula="of:=IFERROR(VLOOKUP([.$Q11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119];[$特性番号.$A$1:$特性番号.$B$8];2;0);0)" office:value-type="float" office:value="0" calcext:value-type="float">
            <text:p>0</text:p>
          </table:table-cell>
          <table:table-cell office:value-type="string" calcext:value-type="string">
            <text:p>航海 - アタッカーになったときに発動できる。自分の山札の上から1枚を、裏のまま魔力ゾーンに置く。¶自分の魔力ゾーンのカードが6つ以上の間「ダブルプレッシャー」を得る。</text:p>
          </table:table-cell>
          <table:table-cell table:style-name="ce8" table:formula="of:=NA()" office:value-type="string" office:string-value="" calcext:value-type="error">
            <text:p>#N/A</text:p>
          </table:table-cell>
          <table:table-cell table:formula="of:=IFERROR(VLOOKUP([.$V119];[$遺業能力番号.$A$1:$遺業能力番号.$B$9];2;0);0)" office:value-type="float" office:value="0" calcext:value-type="float">
            <text:p>0</text:p>
          </table:table-cell>
          <table:table-cell office:value-type="string" calcext:value-type="string">
            <text:p>https://one-draw.jp/ijinden/cardlist/001/card/01_079.png</text:p>
          </table:table-cell>
          <table:table-cell table:formula="of:=CONCATENATE([$JSON.$A$1];[.$C119];[$JSON.$B$1];[.$E119];[$JSON.$C$1];[.$F119];[$JSON.$D$1];IF(ISNA([.$S119]);&quot;null&quot;;&quot;&quot;&quot;&quot;&amp;[.$S119]&amp;&quot;&quot;&quot;&quot;);[$JSON.$E$1];[.$U119];[$JSON.$F$1];IF(ISNA([.$V119]);&quot;null&quot;;&quot;&quot;&quot;&quot;&amp;[.$V119]&amp;&quot;&quot;&quot;&quot;);[$JSON.$G$1];[.$X119];[$JSON.$H$1];[.$H119];[$JSON.$I$1];[.J119];[$JSON.$J$1];[.$L119];[$JSON.$K$1];[.$O119];[$JSON.$L$1];[.$N119];[$JSON.$M$1];[.$R119];[$JSON.$N$1];[.$T119];[$JSON.$O$1];[.$W119];[$JSON.$P$1];[.$A119];[$JSON.$Q$1];[.$B119];[$JSON.$R$1])" office:value-type="string" office:string-value="{&quot;id&quot;:&quot;1-79&quot;,&quot;name&quot;:&quot;アレッサンドロ・ヴァリニャーノ&quot;,&quot;kana&quot;:&quot;あれっさんどろゔぁりにゃーの&quot;,&quot;traitText&quot;:null,&quot;ruleText&quot;:&quot;航海 - アタッカーになったときに発動できる。自分の山札の上から1枚を、裏のまま魔力ゾーンに置く。¶自分の魔力ゾーンのカードが6つ以上の間「ダブルプレッシャー」を得る。&quot;,&quot;legacyText&quot;:null,&quot;imageUrl&quot;:&quot;https://one-draw.jp/ijinden/cardlist/001/card/01_079.png&quot;,&quot;expansion&quot;:15,&quot;rarity&quot;:1,&quot;type&quot;:1,&quot;level&quot;:5,&quot;color&quot;:4,&quot;term&quot;:1,&quot;trait&quot;:0,&quot;legacy&quot;:0,&quot;orderTable&quot;:118,&quot;orderDeck&quot;:167}," calcext:value-type="string">
            <text:p>{"id":"1-79","name":"アレッサンドロ・ヴァリニャーノ","kana":"あれっさんどろゔぁりにゃーの","traitText":null,"ruleText":"航海 - アタッカーになったときに発動できる。自分の山札の上から1枚を、裏のまま魔力ゾーンに置く。¶自分の魔力ゾーンのカードが6つ以上の間「ダブルプレッシャー」を得る。","legacyText":null,"imageUrl":"https://one-draw.jp/ijinden/cardlist/001/card/01_079.png","expansion":15,"rarity":1,"type":1,"level":5,"color":4,"term":1,"trait":0,"legacy":0,"orderTable":118,"orderDeck":167},</text:p>
          </table:table-cell>
          <table:table-cell table:number-columns-repeated="16347"/>
        </table:table-row>
        <table:table-row table:style-name="ro2">
          <table:table-cell office:value-type="float" office:value="119" calcext:value-type="float">
            <text:p>119</text:p>
          </table:table-cell>
          <table:table-cell office:value-type="float" office:value="193" calcext:value-type="float">
            <text:p>193</text:p>
          </table:table-cell>
          <table:table-cell office:value-type="string" calcext:value-type="string">
            <text:p>1-80</text:p>
          </table:table-cell>
          <table:table-cell office:value-type="float" office:value="80" calcext:value-type="float">
            <text:p>80</text:p>
          </table:table-cell>
          <table:table-cell office:value-type="string" calcext:value-type="string">
            <text:p>角倉了以</text:p>
          </table:table-cell>
          <table:table-cell office:value-type="string" calcext:value-type="string">
            <text:p>すみのくらりょうい</text:p>
          </table:table-cell>
          <table:table-cell office:value-type="string" calcext:value-type="string">
            <text:p>第１弾ブースターパック</text:p>
          </table:table-cell>
          <table:table-cell table:formula="of:=VLOOKUP([.G120];[$収録番号.$A$1:$収録番号.$B$9];2;0)" office:value-type="float" office:value="15" calcext:value-type="float">
            <text:p>15</text:p>
          </table:table-cell>
          <table:table-cell office:value-type="string" calcext:value-type="string">
            <text:p>N</text:p>
          </table:table-cell>
          <table:table-cell table:formula="of:=VLOOKUP([.I120];[$レアリティ番号.$A$1:$レアリティ番号.$B$4];2;0)" office:value-type="float" office:value="1" calcext:value-type="float">
            <text:p>1</text:p>
          </table:table-cell>
          <table:table-cell office:value-type="string" calcext:value-type="string">
            <text:p>イジン</text:p>
          </table:table-cell>
          <table:table-cell table:formula="of:=VLOOKUP([.K120];[$種類番号.$A$1:$種類番号.$B$4];2;0)" office:value-type="float" office:value="1" calcext:value-type="float">
            <text:p>1</text:p>
          </table:table-cell>
          <table:table-cell office:value-type="string" calcext:value-type="string">
            <text:p>緑</text:p>
          </table:table-cell>
          <table:table-cell table:formula="of:=VLOOKUP([.M120];[$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0];[$特性番号.$A$1:$特性番号.$B$8];2;0);0)" office:value-type="float" office:value="0" calcext:value-type="float">
            <text:p>0</text:p>
          </table:table-cell>
          <table:table-cell office:value-type="string" calcext:value-type="string">
            <text:p>「航海」が発動したとき、相手の戦場のガーディアン1体を裏のまま魔力ゾーンに置く。</text:p>
          </table:table-cell>
          <table:table-cell table:style-name="ce8" table:formula="of:=NA()" office:value-type="string" office:string-value="" calcext:value-type="error">
            <text:p>#N/A</text:p>
          </table:table-cell>
          <table:table-cell table:formula="of:=IFERROR(VLOOKUP([.$V120];[$遺業能力番号.$A$1:$遺業能力番号.$B$9];2;0);0)" office:value-type="float" office:value="0" calcext:value-type="float">
            <text:p>0</text:p>
          </table:table-cell>
          <table:table-cell office:value-type="string" calcext:value-type="string">
            <text:p>https://one-draw.jp/ijinden/cardlist/001/card/01_080.png</text:p>
          </table:table-cell>
          <table:table-cell table:formula="of:=CONCATENATE([$JSON.$A$1];[.$C120];[$JSON.$B$1];[.$E120];[$JSON.$C$1];[.$F120];[$JSON.$D$1];IF(ISNA([.$S120]);&quot;null&quot;;&quot;&quot;&quot;&quot;&amp;[.$S120]&amp;&quot;&quot;&quot;&quot;);[$JSON.$E$1];[.$U120];[$JSON.$F$1];IF(ISNA([.$V120]);&quot;null&quot;;&quot;&quot;&quot;&quot;&amp;[.$V120]&amp;&quot;&quot;&quot;&quot;);[$JSON.$G$1];[.$X120];[$JSON.$H$1];[.$H120];[$JSON.$I$1];[.J120];[$JSON.$J$1];[.$L120];[$JSON.$K$1];[.$O120];[$JSON.$L$1];[.$N120];[$JSON.$M$1];[.$R120];[$JSON.$N$1];[.$T120];[$JSON.$O$1];[.$W120];[$JSON.$P$1];[.$A120];[$JSON.$Q$1];[.$B120];[$JSON.$R$1])" office:value-type="string" office:string-value="{&quot;id&quot;:&quot;1-80&quot;,&quot;name&quot;:&quot;角倉了以&quot;,&quot;kana&quot;:&quot;すみのくらりょうい&quot;,&quot;traitText&quot;:null,&quot;ruleText&quot;:&quot;「航海」が発動したとき、相手の戦場のガーディアン1体を裏のまま魔力ゾーンに置く。&quot;,&quot;legacyText&quot;:null,&quot;imageUrl&quot;:&quot;https://one-draw.jp/ijinden/cardlist/001/card/01_080.png&quot;,&quot;expansion&quot;:15,&quot;rarity&quot;:1,&quot;type&quot;:1,&quot;level&quot;:6,&quot;color&quot;:4,&quot;term&quot;:0,&quot;trait&quot;:0,&quot;legacy&quot;:0,&quot;orderTable&quot;:119,&quot;orderDeck&quot;:193}," calcext:value-type="string">
            <text:p>{"id":"1-80","name":"角倉了以","kana":"すみのくらりょうい","traitText":null,"ruleText":"「航海」が発動したとき、相手の戦場のガーディアン1体を裏のまま魔力ゾーンに置く。","legacyText":null,"imageUrl":"https://one-draw.jp/ijinden/cardlist/001/card/01_080.png","expansion":15,"rarity":1,"type":1,"level":6,"color":4,"term":0,"trait":0,"legacy":0,"orderTable":119,"orderDeck":193},</text:p>
          </table:table-cell>
          <table:table-cell table:number-columns-repeated="16347"/>
        </table:table-row>
        <table:table-row table:style-name="ro2">
          <table:table-cell office:value-type="float" office:value="120" calcext:value-type="float">
            <text:p>120</text:p>
          </table:table-cell>
          <table:table-cell office:value-type="float" office:value="196" calcext:value-type="float">
            <text:p>196</text:p>
          </table:table-cell>
          <table:table-cell office:value-type="string" calcext:value-type="string">
            <text:p>Y-1</text:p>
          </table:table-cell>
          <table:table-cell office:value-type="float" office:value="1" calcext:value-type="float">
            <text:p>1</text:p>
          </table:table-cell>
          <table:table-cell office:value-type="string" calcext:value-type="string">
            <text:p>諸葛亮</text:p>
          </table:table-cell>
          <table:table-cell office:value-type="string" calcext:value-type="string">
            <text:p>しょかつりょう</text:p>
          </table:table-cell>
          <table:table-cell office:value-type="string" calcext:value-type="string">
            <text:p>三国の英傑デッキ</text:p>
          </table:table-cell>
          <table:table-cell table:formula="of:=VLOOKUP([.G121];[$収録番号.$A$1:$収録番号.$B$9];2;0)" office:value-type="float" office:value="20" calcext:value-type="float">
            <text:p>20</text:p>
          </table:table-cell>
          <table:table-cell office:value-type="string" calcext:value-type="string">
            <text:p>SR</text:p>
          </table:table-cell>
          <table:table-cell table:formula="of:=VLOOKUP([.I121];[$レアリティ番号.$A$1:$レアリティ番号.$B$4];2;0)" office:value-type="float" office:value="4" calcext:value-type="float">
            <text:p>4</text:p>
          </table:table-cell>
          <table:table-cell office:value-type="string" calcext:value-type="string">
            <text:p>イジン</text:p>
          </table:table-cell>
          <table:table-cell table:formula="of:=VLOOKUP([.K121];[$種類番号.$A$1:$種類番号.$B$4];2;0)" office:value-type="float" office:value="1" calcext:value-type="float">
            <text:p>1</text:p>
          </table:table-cell>
          <table:table-cell office:value-type="string" calcext:value-type="string">
            <text:p>黄</text:p>
          </table:table-cell>
          <table:table-cell table:formula="of:=VLOOKUP([.M121];[$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1];[$特性番号.$A$1:$特性番号.$B$8];2;0);0)" office:value-type="float" office:value="0" calcext:value-type="float">
            <text:p>0</text:p>
          </table:table-cell>
          <table:table-cell office:value-type="string" calcext:value-type="string">
            <text:p>戦場に置かれたときに発動できる。自分の山札の下から1枚を見る。ハイケイなら戦場に置いてもよい。¶黄のハイケイが自分の戦場に置かれるたび、1ドローする。</text:p>
          </table:table-cell>
          <table:table-cell table:style-name="ce8" office:value-type="string" calcext:value-type="string">
            <text:p>反魂</text:p>
          </table:table-cell>
          <table:table-cell table:formula="of:=IFERROR(VLOOKUP([.$V121];[$遺業能力番号.$A$1:$遺業能力番号.$B$9];2;0);0)" office:value-type="float" office:value="6" calcext:value-type="float">
            <text:p>6</text:p>
          </table:table-cell>
          <table:table-cell office:value-type="string" calcext:value-type="string">
            <text:p>https://one-draw.jp/ijinden/cardlist/Y01/card/02_Y_001.png</text:p>
          </table:table-cell>
          <table:table-cell table:formula="of:=CONCATENATE([$JSON.$A$1];[.$C121];[$JSON.$B$1];[.$E121];[$JSON.$C$1];[.$F121];[$JSON.$D$1];IF(ISNA([.$S121]);&quot;null&quot;;&quot;&quot;&quot;&quot;&amp;[.$S121]&amp;&quot;&quot;&quot;&quot;);[$JSON.$E$1];[.$U121];[$JSON.$F$1];IF(ISNA([.$V121]);&quot;null&quot;;&quot;&quot;&quot;&quot;&amp;[.$V121]&amp;&quot;&quot;&quot;&quot;);[$JSON.$G$1];[.$X121];[$JSON.$H$1];[.$H121];[$JSON.$I$1];[.J121];[$JSON.$J$1];[.$L121];[$JSON.$K$1];[.$O121];[$JSON.$L$1];[.$N121];[$JSON.$M$1];[.$R121];[$JSON.$N$1];[.$T121];[$JSON.$O$1];[.$W121];[$JSON.$P$1];[.$A121];[$JSON.$Q$1];[.$B121];[$JSON.$R$1])" office:value-type="string" office:string-value="{&quot;id&quot;:&quot;Y-1&quot;,&quot;name&quot;:&quot;諸葛亮&quot;,&quot;kana&quot;:&quot;しょかつりょう&quot;,&quot;traitText&quot;:null,&quot;ruleText&quot;:&quot;戦場に置かれたときに発動できる。自分の山札の下から1枚を見る。ハイケイなら戦場に置いてもよい。¶黄のハイケイが自分の戦場に置かれるたび、1ドローする。&quot;,&quot;legacyText&quot;:&quot;反魂&quot;,&quot;imageUrl&quot;:&quot;https://one-draw.jp/ijinden/cardlist/Y01/card/02_Y_001.png&quot;,&quot;expansion&quot;:20,&quot;rarity&quot;:4,&quot;type&quot;:1,&quot;level&quot;:6,&quot;color&quot;:8,&quot;term&quot;:0,&quot;trait&quot;:0,&quot;legacy&quot;:6,&quot;orderTable&quot;:120,&quot;orderDeck&quot;:196}," calcext:value-type="string">
            <text:p>{"id":"Y-1","name":"諸葛亮","kana":"しょかつりょう","traitText":null,"ruleText":"戦場に置かれたときに発動できる。自分の山札の下から1枚を見る。ハイケイなら戦場に置いてもよい。¶黄のハイケイが自分の戦場に置かれるたび、1ドローする。","legacyText":"反魂","imageUrl":"https://one-draw.jp/ijinden/cardlist/Y01/card/02_Y_001.png","expansion":20,"rarity":4,"type":1,"level":6,"color":8,"term":0,"trait":0,"legacy":6,"orderTable":120,"orderDeck":196},</text:p>
          </table:table-cell>
          <table:table-cell table:number-columns-repeated="16347"/>
        </table:table-row>
        <table:table-row table:style-name="ro2">
          <table:table-cell office:value-type="float" office:value="121" calcext:value-type="float">
            <text:p>121</text:p>
          </table:table-cell>
          <table:table-cell office:value-type="float" office:value="52" calcext:value-type="float">
            <text:p>52</text:p>
          </table:table-cell>
          <table:table-cell office:value-type="string" calcext:value-type="string">
            <text:p>Y-2</text:p>
          </table:table-cell>
          <table:table-cell office:value-type="float" office:value="2" calcext:value-type="float">
            <text:p>2</text:p>
          </table:table-cell>
          <table:table-cell office:value-type="string" calcext:value-type="string">
            <text:p>今川義元</text:p>
          </table:table-cell>
          <table:table-cell office:value-type="string" calcext:value-type="string">
            <text:p>いまがわよしもと</text:p>
          </table:table-cell>
          <table:table-cell office:value-type="string" calcext:value-type="string">
            <text:p>三国の英傑デッキ</text:p>
          </table:table-cell>
          <table:table-cell table:formula="of:=VLOOKUP([.G122];[$収録番号.$A$1:$収録番号.$B$9];2;0)" office:value-type="float" office:value="20" calcext:value-type="float">
            <text:p>20</text:p>
          </table:table-cell>
          <table:table-cell office:value-type="string" calcext:value-type="string">
            <text:p>N</text:p>
          </table:table-cell>
          <table:table-cell table:formula="of:=VLOOKUP([.I122];[$レアリティ番号.$A$1:$レアリティ番号.$B$4];2;0)" office:value-type="float" office:value="1" calcext:value-type="float">
            <text:p>1</text:p>
          </table:table-cell>
          <table:table-cell office:value-type="string" calcext:value-type="string">
            <text:p>イジン</text:p>
          </table:table-cell>
          <table:table-cell table:formula="of:=VLOOKUP([.K122];[$種類番号.$A$1:$種類番号.$B$4];2;0)" office:value-type="float" office:value="1" calcext:value-type="float">
            <text:p>1</text:p>
          </table:table-cell>
          <table:table-cell office:value-type="string" calcext:value-type="string">
            <text:p>黄</text:p>
          </table:table-cell>
          <table:table-cell table:formula="of:=VLOOKUP([.M122];[$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2];[$能力語番号.$A$1:$能力語番号.$B$10];2;0);0)" office:value-type="float" office:value="0" calcext:value-type="float">
            <text:p>0</text:p>
          </table:table-cell>
          <table:table-cell office:value-type="string" calcext:value-type="string">
            <text:p>剣術</text:p>
          </table:table-cell>
          <table:table-cell table:formula="of:=IFERROR(VLOOKUP([.$S122];[$特性番号.$A$1:$特性番号.$B$8];2;0);0)" office:value-type="float" office:value="1" calcext:value-type="float">
            <text:p>1</text:p>
          </table:table-cell>
          <table:table-cell office:value-type="string" calcext:value-type="string">
            <text:p>ウォッチャー¶破壊されたとき、戦場のハイケイ1つを指定して発動できる。そのハイケイを破壊する。¶アタック+500</text:p>
          </table:table-cell>
          <table:table-cell table:style-name="ce8" office:value-type="string" calcext:value-type="string">
            <text:p>1ドローする</text:p>
          </table:table-cell>
          <table:table-cell table:formula="of:=IFERROR(VLOOKUP([.$V122];[$遺業能力番号.$A$1:$遺業能力番号.$B$9];2;0);0)" office:value-type="float" office:value="4" calcext:value-type="float">
            <text:p>4</text:p>
          </table:table-cell>
          <table:table-cell office:value-type="string" calcext:value-type="string">
            <text:p>https://one-draw.jp/ijinden/cardlist/Y01/card/02_Y_002.png</text:p>
          </table:table-cell>
          <table:table-cell table:formula="of:=CONCATENATE([$JSON.$A$1];[.$C122];[$JSON.$B$1];[.$E122];[$JSON.$C$1];[.$F122];[$JSON.$D$1];IF(ISNA([.$S122]);&quot;null&quot;;&quot;&quot;&quot;&quot;&amp;[.$S122]&amp;&quot;&quot;&quot;&quot;);[$JSON.$E$1];[.$U122];[$JSON.$F$1];IF(ISNA([.$V122]);&quot;null&quot;;&quot;&quot;&quot;&quot;&amp;[.$V122]&amp;&quot;&quot;&quot;&quot;);[$JSON.$G$1];[.$X122];[$JSON.$H$1];[.$H122];[$JSON.$I$1];[.J122];[$JSON.$J$1];[.$L122];[$JSON.$K$1];[.$O122];[$JSON.$L$1];[.$N122];[$JSON.$M$1];[.$R122];[$JSON.$N$1];[.$T122];[$JSON.$O$1];[.$W122];[$JSON.$P$1];[.$A122];[$JSON.$Q$1];[.$B122];[$JSON.$R$1])" office:value-type="string" office:string-value="{&quot;id&quot;:&quot;Y-2&quot;,&quot;name&quot;:&quot;今川義元&quot;,&quot;kana&quot;:&quot;いまがわよしもと&quot;,&quot;traitText&quot;:&quot;剣術&quot;,&quot;ruleText&quot;:&quot;ウォッチャー¶破壊されたとき、戦場のハイケイ1つを指定して発動できる。そのハイケイを破壊する。¶アタック+500&quot;,&quot;legacyText&quot;:&quot;1ドローする&quot;,&quot;imageUrl&quot;:&quot;https://one-draw.jp/ijinden/cardlist/Y01/card/02_Y_002.png&quot;,&quot;expansion&quot;:20,&quot;rarity&quot;:1,&quot;type&quot;:1,&quot;level&quot;:2,&quot;color&quot;:8,&quot;term&quot;:0,&quot;trait&quot;:1,&quot;legacy&quot;:4,&quot;orderTable&quot;:121,&quot;orderDeck&quot;:52}," calcext:value-type="string">
            <text:p>{"id":"Y-2","name":"今川義元","kana":"いまがわよしもと","traitText":"剣術","ruleText":"ウォッチャー¶破壊されたとき、戦場のハイケイ1つを指定して発動できる。そのハイケイを破壊する。¶アタック+500","legacyText":"1ドローする","imageUrl":"https://one-draw.jp/ijinden/cardlist/Y01/card/02_Y_002.png","expansion":20,"rarity":1,"type":1,"level":2,"color":8,"term":0,"trait":1,"legacy":4,"orderTable":121,"orderDeck":52},</text:p>
          </table:table-cell>
          <table:table-cell table:number-columns-repeated="16347"/>
        </table:table-row>
        <table:table-row table:style-name="ro2">
          <table:table-cell office:value-type="float" office:value="122" calcext:value-type="float">
            <text:p>122</text:p>
          </table:table-cell>
          <table:table-cell office:value-type="float" office:value="132" calcext:value-type="float">
            <text:p>132</text:p>
          </table:table-cell>
          <table:table-cell office:value-type="string" calcext:value-type="string">
            <text:p>Y-3</text:p>
          </table:table-cell>
          <table:table-cell office:value-type="float" office:value="3" calcext:value-type="float">
            <text:p>3</text:p>
          </table:table-cell>
          <table:table-cell office:value-type="string" calcext:value-type="string">
            <text:p>周瑜</text:p>
          </table:table-cell>
          <table:table-cell office:value-type="string" calcext:value-type="string">
            <text:p>しゅうゆ</text:p>
          </table:table-cell>
          <table:table-cell office:value-type="string" calcext:value-type="string">
            <text:p>三国の英傑デッキ</text:p>
          </table:table-cell>
          <table:table-cell table:formula="of:=VLOOKUP([.G123];[$収録番号.$A$1:$収録番号.$B$9];2;0)" office:value-type="float" office:value="20" calcext:value-type="float">
            <text:p>20</text:p>
          </table:table-cell>
          <table:table-cell office:value-type="string" calcext:value-type="string">
            <text:p>N</text:p>
          </table:table-cell>
          <table:table-cell table:formula="of:=VLOOKUP([.I123];[$レアリティ番号.$A$1:$レアリティ番号.$B$4];2;0)" office:value-type="float" office:value="1" calcext:value-type="float">
            <text:p>1</text:p>
          </table:table-cell>
          <table:table-cell office:value-type="string" calcext:value-type="string">
            <text:p>イジン</text:p>
          </table:table-cell>
          <table:table-cell table:formula="of:=VLOOKUP([.K123];[$種類番号.$A$1:$種類番号.$B$4];2;0)" office:value-type="float" office:value="1" calcext:value-type="float">
            <text:p>1</text:p>
          </table:table-cell>
          <table:table-cell office:value-type="string" calcext:value-type="string">
            <text:p>黄</text:p>
          </table:table-cell>
          <table:table-cell table:formula="of:=VLOOKUP([.M123];[$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3];[$特性番号.$A$1:$特性番号.$B$8];2;0);0)" office:value-type="float" office:value="0" calcext:value-type="float">
            <text:p>0</text:p>
          </table:table-cell>
          <table:table-cell office:value-type="string" calcext:value-type="string">
            <text:p>カードが相手の墓地に5枚以下しかない間「ウォッチャー」を得る。¶自分の戦場の「即応」を持つイジン1体につき「アタック+1000」を得る。</text:p>
          </table:table-cell>
          <table:table-cell table:style-name="ce8" office:value-type="string" calcext:value-type="string">
            <text:p>魔力化</text:p>
          </table:table-cell>
          <table:table-cell table:formula="of:=IFERROR(VLOOKUP([.$V123];[$遺業能力番号.$A$1:$遺業能力番号.$B$9];2;0);0)" office:value-type="float" office:value="1" calcext:value-type="float">
            <text:p>1</text:p>
          </table:table-cell>
          <table:table-cell office:value-type="string" calcext:value-type="string">
            <text:p>https://one-draw.jp/ijinden/cardlist/Y01/card/02_Y_003.png</text:p>
          </table:table-cell>
          <table:table-cell table:formula="of:=CONCATENATE([$JSON.$A$1];[.$C123];[$JSON.$B$1];[.$E123];[$JSON.$C$1];[.$F123];[$JSON.$D$1];IF(ISNA([.$S123]);&quot;null&quot;;&quot;&quot;&quot;&quot;&amp;[.$S123]&amp;&quot;&quot;&quot;&quot;);[$JSON.$E$1];[.$U123];[$JSON.$F$1];IF(ISNA([.$V123]);&quot;null&quot;;&quot;&quot;&quot;&quot;&amp;[.$V123]&amp;&quot;&quot;&quot;&quot;);[$JSON.$G$1];[.$X123];[$JSON.$H$1];[.$H123];[$JSON.$I$1];[.J123];[$JSON.$J$1];[.$L123];[$JSON.$K$1];[.$O123];[$JSON.$L$1];[.$N123];[$JSON.$M$1];[.$R123];[$JSON.$N$1];[.$T123];[$JSON.$O$1];[.$W123];[$JSON.$P$1];[.$A123];[$JSON.$Q$1];[.$B123];[$JSON.$R$1])" office:value-type="string" office:string-value="{&quot;id&quot;:&quot;Y-3&quot;,&quot;name&quot;:&quot;周瑜&quot;,&quot;kana&quot;:&quot;しゅうゆ&quot;,&quot;traitText&quot;:null,&quot;ruleText&quot;:&quot;カードが相手の墓地に5枚以下しかない間「ウォッチャー」を得る。¶自分の戦場の「即応」を持つイジン1体につき「アタック+1000」を得る。&quot;,&quot;legacyText&quot;:&quot;魔力化&quot;,&quot;imageUrl&quot;:&quot;https://one-draw.jp/ijinden/cardlist/Y01/card/02_Y_003.png&quot;,&quot;expansion&quot;:20,&quot;rarity&quot;:1,&quot;type&quot;:1,&quot;level&quot;:4,&quot;color&quot;:8,&quot;term&quot;:0,&quot;trait&quot;:0,&quot;legacy&quot;:1,&quot;orderTable&quot;:122,&quot;orderDeck&quot;:132}," calcext:value-type="string">
            <text:p>{"id":"Y-3","name":"周瑜","kana":"しゅうゆ","traitText":null,"ruleText":"カードが相手の墓地に5枚以下しかない間「ウォッチャー」を得る。¶自分の戦場の「即応」を持つイジン1体につき「アタック+1000」を得る。","legacyText":"魔力化","imageUrl":"https://one-draw.jp/ijinden/cardlist/Y01/card/02_Y_003.png","expansion":20,"rarity":1,"type":1,"level":4,"color":8,"term":0,"trait":0,"legacy":1,"orderTable":122,"orderDeck":132},</text:p>
          </table:table-cell>
          <table:table-cell table:number-columns-repeated="16347"/>
        </table:table-row>
        <table:table-row table:style-name="ro2">
          <table:table-cell office:value-type="float" office:value="123" calcext:value-type="float">
            <text:p>123</text:p>
          </table:table-cell>
          <table:table-cell office:value-type="float" office:value="171" calcext:value-type="float">
            <text:p>171</text:p>
          </table:table-cell>
          <table:table-cell office:value-type="string" calcext:value-type="string">
            <text:p>Y-4</text:p>
          </table:table-cell>
          <table:table-cell office:value-type="float" office:value="4" calcext:value-type="float">
            <text:p>4</text:p>
          </table:table-cell>
          <table:table-cell office:value-type="string" calcext:value-type="string">
            <text:p>孫権</text:p>
          </table:table-cell>
          <table:table-cell office:value-type="string" calcext:value-type="string">
            <text:p>そんけん</text:p>
          </table:table-cell>
          <table:table-cell office:value-type="string" calcext:value-type="string">
            <text:p>三国の英傑デッキ</text:p>
          </table:table-cell>
          <table:table-cell table:formula="of:=VLOOKUP([.G124];[$収録番号.$A$1:$収録番号.$B$9];2;0)" office:value-type="float" office:value="20" calcext:value-type="float">
            <text:p>20</text:p>
          </table:table-cell>
          <table:table-cell office:value-type="string" calcext:value-type="string">
            <text:p>N</text:p>
          </table:table-cell>
          <table:table-cell table:formula="of:=VLOOKUP([.I124];[$レアリティ番号.$A$1:$レアリティ番号.$B$4];2;0)" office:value-type="float" office:value="1" calcext:value-type="float">
            <text:p>1</text:p>
          </table:table-cell>
          <table:table-cell office:value-type="string" calcext:value-type="string">
            <text:p>イジン</text:p>
          </table:table-cell>
          <table:table-cell table:formula="of:=VLOOKUP([.K124];[$種類番号.$A$1:$種類番号.$B$4];2;0)" office:value-type="float" office:value="1" calcext:value-type="float">
            <text:p>1</text:p>
          </table:table-cell>
          <table:table-cell office:value-type="string" calcext:value-type="string">
            <text:p>黄</text:p>
          </table:table-cell>
          <table:table-cell table:formula="of:=VLOOKUP([.M124];[$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4];[$特性番号.$A$1:$特性番号.$B$8];2;0);0)" office:value-type="float" office:value="0" calcext:value-type="float">
            <text:p>0</text:p>
          </table:table-cell>
          <table:table-cell office:value-type="string" calcext:value-type="string">
            <text:p>即応¶ウォッチャー¶自分の戦場の赤のイジンが寝るたびに発動できる。自分の手札1枚を墓地に置いて、1ドローする。</text:p>
          </table:table-cell>
          <table:table-cell table:style-name="ce8" table:formula="of:=NA()" office:value-type="string" office:string-value="" calcext:value-type="error">
            <text:p>#N/A</text:p>
          </table:table-cell>
          <table:table-cell table:formula="of:=IFERROR(VLOOKUP([.$V124];[$遺業能力番号.$A$1:$遺業能力番号.$B$9];2;0);0)" office:value-type="float" office:value="0" calcext:value-type="float">
            <text:p>0</text:p>
          </table:table-cell>
          <table:table-cell office:value-type="string" calcext:value-type="string">
            <text:p>https://one-draw.jp/ijinden/cardlist/Y01/card/02_Y_004.png</text:p>
          </table:table-cell>
          <table:table-cell table:formula="of:=CONCATENATE([$JSON.$A$1];[.$C124];[$JSON.$B$1];[.$E124];[$JSON.$C$1];[.$F124];[$JSON.$D$1];IF(ISNA([.$S124]);&quot;null&quot;;&quot;&quot;&quot;&quot;&amp;[.$S124]&amp;&quot;&quot;&quot;&quot;);[$JSON.$E$1];[.$U124];[$JSON.$F$1];IF(ISNA([.$V124]);&quot;null&quot;;&quot;&quot;&quot;&quot;&amp;[.$V124]&amp;&quot;&quot;&quot;&quot;);[$JSON.$G$1];[.$X124];[$JSON.$H$1];[.$H124];[$JSON.$I$1];[.J124];[$JSON.$J$1];[.$L124];[$JSON.$K$1];[.$O124];[$JSON.$L$1];[.$N124];[$JSON.$M$1];[.$R124];[$JSON.$N$1];[.$T124];[$JSON.$O$1];[.$W124];[$JSON.$P$1];[.$A124];[$JSON.$Q$1];[.$B124];[$JSON.$R$1])" office:value-type="string" office:string-value="{&quot;id&quot;:&quot;Y-4&quot;,&quot;name&quot;:&quot;孫権&quot;,&quot;kana&quot;:&quot;そんけん&quot;,&quot;traitText&quot;:null,&quot;ruleText&quot;:&quot;即応¶ウォッチャー¶自分の戦場の赤のイジンが寝るたびに発動できる。自分の手札1枚を墓地に置いて、1ドローする。&quot;,&quot;legacyText&quot;:null,&quot;imageUrl&quot;:&quot;https://one-draw.jp/ijinden/cardlist/Y01/card/02_Y_004.png&quot;,&quot;expansion&quot;:20,&quot;rarity&quot;:1,&quot;type&quot;:1,&quot;level&quot;:5,&quot;color&quot;:8,&quot;term&quot;:0,&quot;trait&quot;:0,&quot;legacy&quot;:0,&quot;orderTable&quot;:123,&quot;orderDeck&quot;:171}," calcext:value-type="string">
            <text:p>{"id":"Y-4","name":"孫権","kana":"そんけん","traitText":null,"ruleText":"即応¶ウォッチャー¶自分の戦場の赤のイジンが寝るたびに発動できる。自分の手札1枚を墓地に置いて、1ドローする。","legacyText":null,"imageUrl":"https://one-draw.jp/ijinden/cardlist/Y01/card/02_Y_004.png","expansion":20,"rarity":1,"type":1,"level":5,"color":8,"term":0,"trait":0,"legacy":0,"orderTable":123,"orderDeck":171},</text:p>
          </table:table-cell>
          <table:table-cell table:number-columns-repeated="16347"/>
        </table:table-row>
        <table:table-row table:style-name="ro2">
          <table:table-cell office:value-type="float" office:value="124" calcext:value-type="float">
            <text:p>124</text:p>
          </table:table-cell>
          <table:table-cell office:value-type="float" office:value="213" calcext:value-type="float">
            <text:p>213</text:p>
          </table:table-cell>
          <table:table-cell office:value-type="string" calcext:value-type="string">
            <text:p>Y-5</text:p>
          </table:table-cell>
          <table:table-cell office:value-type="float" office:value="5" calcext:value-type="float">
            <text:p>5</text:p>
          </table:table-cell>
          <table:table-cell office:value-type="string" calcext:value-type="string">
            <text:p>シャクシャイン</text:p>
          </table:table-cell>
          <table:table-cell office:value-type="string" calcext:value-type="string">
            <text:p>しゃくしゃいん</text:p>
          </table:table-cell>
          <table:table-cell office:value-type="string" calcext:value-type="string">
            <text:p>三国の英傑デッキ</text:p>
          </table:table-cell>
          <table:table-cell table:formula="of:=VLOOKUP([.G125];[$収録番号.$A$1:$収録番号.$B$9];2;0)" office:value-type="float" office:value="20" calcext:value-type="float">
            <text:p>20</text:p>
          </table:table-cell>
          <table:table-cell office:value-type="string" calcext:value-type="string">
            <text:p>N</text:p>
          </table:table-cell>
          <table:table-cell table:formula="of:=VLOOKUP([.I125];[$レアリティ番号.$A$1:$レアリティ番号.$B$4];2;0)" office:value-type="float" office:value="1" calcext:value-type="float">
            <text:p>1</text:p>
          </table:table-cell>
          <table:table-cell office:value-type="string" calcext:value-type="string">
            <text:p>イジン</text:p>
          </table:table-cell>
          <table:table-cell table:formula="of:=VLOOKUP([.K125];[$種類番号.$A$1:$種類番号.$B$4];2;0)" office:value-type="float" office:value="1" calcext:value-type="float">
            <text:p>1</text:p>
          </table:table-cell>
          <table:table-cell office:value-type="string" calcext:value-type="string">
            <text:p>黄</text:p>
          </table:table-cell>
          <table:table-cell table:formula="of:=VLOOKUP([.M125];[$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office:value-type="string" calcext:value-type="string">
            <text:p>決起</text:p>
          </table:table-cell>
          <table:table-cell table:formula="of:=IFERROR(VLOOKUP([.$Q125];[$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S125];[$特性番号.$A$1:$特性番号.$B$8];2;0);0)" office:value-type="float" office:value="0" calcext:value-type="float">
            <text:p>0</text:p>
          </table:table-cell>
          <table:table-cell office:value-type="string" calcext:value-type="string">
            <text:p>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text:p>
          </table:table-cell>
          <table:table-cell table:style-name="ce8" table:formula="of:=NA()" office:value-type="string" office:string-value="" calcext:value-type="error">
            <text:p>#N/A</text:p>
          </table:table-cell>
          <table:table-cell table:formula="of:=IFERROR(VLOOKUP([.$V125];[$遺業能力番号.$A$1:$遺業能力番号.$B$9];2;0);0)" office:value-type="float" office:value="0" calcext:value-type="float">
            <text:p>0</text:p>
          </table:table-cell>
          <table:table-cell office:value-type="string" calcext:value-type="string">
            <text:p>https://one-draw.jp/ijinden/cardlist/Y01/card/02_Y_005.png</text:p>
          </table:table-cell>
          <table:table-cell table:formula="of:=CONCATENATE([$JSON.$A$1];[.$C125];[$JSON.$B$1];[.$E125];[$JSON.$C$1];[.$F125];[$JSON.$D$1];IF(ISNA([.$S125]);&quot;null&quot;;&quot;&quot;&quot;&quot;&amp;[.$S125]&amp;&quot;&quot;&quot;&quot;);[$JSON.$E$1];[.$U125];[$JSON.$F$1];IF(ISNA([.$V125]);&quot;null&quot;;&quot;&quot;&quot;&quot;&amp;[.$V125]&amp;&quot;&quot;&quot;&quot;);[$JSON.$G$1];[.$X125];[$JSON.$H$1];[.$H125];[$JSON.$I$1];[.J125];[$JSON.$J$1];[.$L125];[$JSON.$K$1];[.$O125];[$JSON.$L$1];[.$N125];[$JSON.$M$1];[.$R125];[$JSON.$N$1];[.$T125];[$JSON.$O$1];[.$W125];[$JSON.$P$1];[.$A125];[$JSON.$Q$1];[.$B125];[$JSON.$R$1])" office:value-type="string" office:string-value="{&quot;id&quot;:&quot;Y-5&quot;,&quot;name&quot;:&quot;シャクシャイン&quot;,&quot;kana&quot;:&quot;しゃくしゃいん&quot;,&quot;traitText&quot;:null,&quot;ruleText&quot;:&quot;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quot;,&quot;legacyText&quot;:null,&quot;imageUrl&quot;:&quot;https://one-draw.jp/ijinden/cardlist/Y01/card/02_Y_005.png&quot;,&quot;expansion&quot;:20,&quot;rarity&quot;:1,&quot;type&quot;:1,&quot;level&quot;:7,&quot;color&quot;:8,&quot;term&quot;:4,&quot;trait&quot;:0,&quot;legacy&quot;:0,&quot;orderTable&quot;:124,&quot;orderDeck&quot;:213}," calcext:value-type="string">
            <text:p>{"id":"Y-5","name":"シャクシャイン","kana":"しゃくしゃいん","traitText":null,"ruleText":"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legacyText":null,"imageUrl":"https://one-draw.jp/ijinden/cardlist/Y01/card/02_Y_005.png","expansion":20,"rarity":1,"type":1,"level":7,"color":8,"term":4,"trait":0,"legacy":0,"orderTable":124,"orderDeck":213},</text:p>
          </table:table-cell>
          <table:table-cell table:number-columns-repeated="16347"/>
        </table:table-row>
        <table:table-row table:style-name="ro2">
          <table:table-cell office:value-type="float" office:value="125" calcext:value-type="float">
            <text:p>125</text:p>
          </table:table-cell>
          <table:table-cell office:value-type="float" office:value="197" calcext:value-type="float">
            <text:p>197</text:p>
          </table:table-cell>
          <table:table-cell office:value-type="string" calcext:value-type="string">
            <text:p>Y-6</text:p>
          </table:table-cell>
          <table:table-cell office:value-type="float" office:value="6" calcext:value-type="float">
            <text:p>6</text:p>
          </table:table-cell>
          <table:table-cell office:value-type="string" calcext:value-type="string">
            <text:p>フビライ・ハン</text:p>
          </table:table-cell>
          <table:table-cell office:value-type="string" calcext:value-type="string">
            <text:p>ふびらいはん</text:p>
          </table:table-cell>
          <table:table-cell office:value-type="string" calcext:value-type="string">
            <text:p>三国の英傑デッキ</text:p>
          </table:table-cell>
          <table:table-cell table:formula="of:=VLOOKUP([.G126];[$収録番号.$A$1:$収録番号.$B$9];2;0)" office:value-type="float" office:value="20" calcext:value-type="float">
            <text:p>20</text:p>
          </table:table-cell>
          <table:table-cell office:value-type="string" calcext:value-type="string">
            <text:p>N</text:p>
          </table:table-cell>
          <table:table-cell table:formula="of:=VLOOKUP([.I126];[$レアリティ番号.$A$1:$レアリティ番号.$B$4];2;0)" office:value-type="float" office:value="1" calcext:value-type="float">
            <text:p>1</text:p>
          </table:table-cell>
          <table:table-cell office:value-type="string" calcext:value-type="string">
            <text:p>イジン</text:p>
          </table:table-cell>
          <table:table-cell table:formula="of:=VLOOKUP([.K126];[$種類番号.$A$1:$種類番号.$B$4];2;0)" office:value-type="float" office:value="1" calcext:value-type="float">
            <text:p>1</text:p>
          </table:table-cell>
          <table:table-cell office:value-type="string" calcext:value-type="string">
            <text:p>黄</text:p>
          </table:table-cell>
          <table:table-cell table:formula="of:=VLOOKUP([.M126];[$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6];[$特性番号.$A$1:$特性番号.$B$8];2;0);0)" office:value-type="float" office:value="0" calcext:value-type="float">
            <text:p>0</text:p>
          </table:table-cell>
          <table:table-cell office:value-type="string" calcext:value-type="string">
            <text:p>ダブルプレッシャー¶戦場に置かれたとき、自分の魔力ゾーンの『ストーン』マリョク2つまでをガーディアンにして戦場に置く。</text:p>
          </table:table-cell>
          <table:table-cell table:style-name="ce8" table:formula="of:=NA()" office:value-type="string" office:string-value="" calcext:value-type="error">
            <text:p>#N/A</text:p>
          </table:table-cell>
          <table:table-cell table:formula="of:=IFERROR(VLOOKUP([.$V126];[$遺業能力番号.$A$1:$遺業能力番号.$B$9];2;0);0)" office:value-type="float" office:value="0" calcext:value-type="float">
            <text:p>0</text:p>
          </table:table-cell>
          <table:table-cell office:value-type="string" calcext:value-type="string">
            <text:p>https://one-draw.jp/ijinden/cardlist/Y01/card/02_Y_006.png</text:p>
          </table:table-cell>
          <table:table-cell table:formula="of:=CONCATENATE([$JSON.$A$1];[.$C126];[$JSON.$B$1];[.$E126];[$JSON.$C$1];[.$F126];[$JSON.$D$1];IF(ISNA([.$S126]);&quot;null&quot;;&quot;&quot;&quot;&quot;&amp;[.$S126]&amp;&quot;&quot;&quot;&quot;);[$JSON.$E$1];[.$U126];[$JSON.$F$1];IF(ISNA([.$V126]);&quot;null&quot;;&quot;&quot;&quot;&quot;&amp;[.$V126]&amp;&quot;&quot;&quot;&quot;);[$JSON.$G$1];[.$X126];[$JSON.$H$1];[.$H126];[$JSON.$I$1];[.J126];[$JSON.$J$1];[.$L126];[$JSON.$K$1];[.$O126];[$JSON.$L$1];[.$N126];[$JSON.$M$1];[.$R126];[$JSON.$N$1];[.$T126];[$JSON.$O$1];[.$W126];[$JSON.$P$1];[.$A126];[$JSON.$Q$1];[.$B126];[$JSON.$R$1])" office:value-type="string" office:string-value="{&quot;id&quot;:&quot;Y-6&quot;,&quot;name&quot;:&quot;フビライ・ハン&quot;,&quot;kana&quot;:&quot;ふびらいはん&quot;,&quot;traitText&quot;:null,&quot;ruleText&quot;:&quot;ダブルプレッシャー¶戦場に置かれたとき、自分の魔力ゾーンの『ストーン』マリョク2つまでをガーディアンにして戦場に置く。&quot;,&quot;legacyText&quot;:null,&quot;imageUrl&quot;:&quot;https://one-draw.jp/ijinden/cardlist/Y01/card/02_Y_006.png&quot;,&quot;expansion&quot;:20,&quot;rarity&quot;:1,&quot;type&quot;:1,&quot;level&quot;:6,&quot;color&quot;:8,&quot;term&quot;:0,&quot;trait&quot;:0,&quot;legacy&quot;:0,&quot;orderTable&quot;:125,&quot;orderDeck&quot;:197}," calcext:value-type="string">
            <text:p>{"id":"Y-6","name":"フビライ・ハン","kana":"ふびらいはん","traitText":null,"ruleText":"ダブルプレッシャー¶戦場に置かれたとき、自分の魔力ゾーンの『ストーン』マリョク2つまでをガーディアンにして戦場に置く。","legacyText":null,"imageUrl":"https://one-draw.jp/ijinden/cardlist/Y01/card/02_Y_006.png","expansion":20,"rarity":1,"type":1,"level":6,"color":8,"term":0,"trait":0,"legacy":0,"orderTable":125,"orderDeck":197},</text:p>
          </table:table-cell>
          <table:table-cell table:number-columns-repeated="16347"/>
        </table:table-row>
        <table:table-row table:style-name="ro2">
          <table:table-cell office:value-type="float" office:value="126" calcext:value-type="float">
            <text:p>126</text:p>
          </table:table-cell>
          <table:table-cell office:value-type="float" office:value="53" calcext:value-type="float">
            <text:p>53</text:p>
          </table:table-cell>
          <table:table-cell office:value-type="string" calcext:value-type="string">
            <text:p>Y-7</text:p>
          </table:table-cell>
          <table:table-cell office:value-type="float" office:value="7" calcext:value-type="float">
            <text:p>7</text:p>
          </table:table-cell>
          <table:table-cell office:value-type="string" calcext:value-type="string">
            <text:p>足利義教</text:p>
          </table:table-cell>
          <table:table-cell office:value-type="string" calcext:value-type="string">
            <text:p>あしかがよしのり</text:p>
          </table:table-cell>
          <table:table-cell office:value-type="string" calcext:value-type="string">
            <text:p>三国の英傑デッキ</text:p>
          </table:table-cell>
          <table:table-cell table:formula="of:=VLOOKUP([.G127];[$収録番号.$A$1:$収録番号.$B$9];2;0)" office:value-type="float" office:value="20" calcext:value-type="float">
            <text:p>20</text:p>
          </table:table-cell>
          <table:table-cell office:value-type="string" calcext:value-type="string">
            <text:p>N</text:p>
          </table:table-cell>
          <table:table-cell table:formula="of:=VLOOKUP([.I127];[$レアリティ番号.$A$1:$レアリティ番号.$B$4];2;0)" office:value-type="float" office:value="1" calcext:value-type="float">
            <text:p>1</text:p>
          </table:table-cell>
          <table:table-cell office:value-type="string" calcext:value-type="string">
            <text:p>イジン</text:p>
          </table:table-cell>
          <table:table-cell table:formula="of:=VLOOKUP([.K127];[$種類番号.$A$1:$種類番号.$B$4];2;0)" office:value-type="float" office:value="1" calcext:value-type="float">
            <text:p>1</text:p>
          </table:table-cell>
          <table:table-cell office:value-type="string" calcext:value-type="string">
            <text:p>黄</text:p>
          </table:table-cell>
          <table:table-cell table:formula="of:=VLOOKUP([.M127];[$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7];[$特性番号.$A$1:$特性番号.$B$8];2;0);0)" office:value-type="float" office:value="0" calcext:value-type="float">
            <text:p>0</text:p>
          </table:table-cell>
          <table:table-cell office:value-type="string" calcext:value-type="string">
            <text:p>この能力はターンに1回しか発動しない。自分の墓地の「遺業能力」が発動したときに発動できる。1ドローする。</text:p>
          </table:table-cell>
          <table:table-cell table:style-name="ce8" table:formula="of:=NA()" office:value-type="string" office:string-value="" calcext:value-type="error">
            <text:p>#N/A</text:p>
          </table:table-cell>
          <table:table-cell table:formula="of:=IFERROR(VLOOKUP([.$V127];[$遺業能力番号.$A$1:$遺業能力番号.$B$9];2;0);0)" office:value-type="float" office:value="0" calcext:value-type="float">
            <text:p>0</text:p>
          </table:table-cell>
          <table:table-cell office:value-type="string" calcext:value-type="string">
            <text:p>https://one-draw.jp/ijinden/cardlist/Y01/card/02_Y_007.png</text:p>
          </table:table-cell>
          <table:table-cell table:formula="of:=CONCATENATE([$JSON.$A$1];[.$C127];[$JSON.$B$1];[.$E127];[$JSON.$C$1];[.$F127];[$JSON.$D$1];IF(ISNA([.$S127]);&quot;null&quot;;&quot;&quot;&quot;&quot;&amp;[.$S127]&amp;&quot;&quot;&quot;&quot;);[$JSON.$E$1];[.$U127];[$JSON.$F$1];IF(ISNA([.$V127]);&quot;null&quot;;&quot;&quot;&quot;&quot;&amp;[.$V127]&amp;&quot;&quot;&quot;&quot;);[$JSON.$G$1];[.$X127];[$JSON.$H$1];[.$H127];[$JSON.$I$1];[.J127];[$JSON.$J$1];[.$L127];[$JSON.$K$1];[.$O127];[$JSON.$L$1];[.$N127];[$JSON.$M$1];[.$R127];[$JSON.$N$1];[.$T127];[$JSON.$O$1];[.$W127];[$JSON.$P$1];[.$A127];[$JSON.$Q$1];[.$B127];[$JSON.$R$1])" office:value-type="string" office:string-value="{&quot;id&quot;:&quot;Y-7&quot;,&quot;name&quot;:&quot;足利義教&quot;,&quot;kana&quot;:&quot;あしかがよしのり&quot;,&quot;traitText&quot;:null,&quot;ruleText&quot;:&quot;この能力はターンに1回しか発動しない。自分の墓地の「遺業能力」が発動したときに発動できる。1ドローする。&quot;,&quot;legacyText&quot;:null,&quot;imageUrl&quot;:&quot;https://one-draw.jp/ijinden/cardlist/Y01/card/02_Y_007.png&quot;,&quot;expansion&quot;:20,&quot;rarity&quot;:1,&quot;type&quot;:1,&quot;level&quot;:2,&quot;color&quot;:8,&quot;term&quot;:0,&quot;trait&quot;:0,&quot;legacy&quot;:0,&quot;orderTable&quot;:126,&quot;orderDeck&quot;:53}," calcext:value-type="string">
            <text:p>{"id":"Y-7","name":"足利義教","kana":"あしかがよしのり","traitText":null,"ruleText":"この能力はターンに1回しか発動しない。自分の墓地の「遺業能力」が発動したときに発動できる。1ドローする。","legacyText":null,"imageUrl":"https://one-draw.jp/ijinden/cardlist/Y01/card/02_Y_007.png","expansion":20,"rarity":1,"type":1,"level":2,"color":8,"term":0,"trait":0,"legacy":0,"orderTable":126,"orderDeck":53},</text:p>
          </table:table-cell>
          <table:table-cell table:number-columns-repeated="16347"/>
        </table:table-row>
        <table:table-row table:style-name="ro2">
          <table:table-cell office:value-type="float" office:value="127" calcext:value-type="float">
            <text:p>127</text:p>
          </table:table-cell>
          <table:table-cell office:value-type="float" office:value="15" calcext:value-type="float">
            <text:p>15</text:p>
          </table:table-cell>
          <table:table-cell office:value-type="string" calcext:value-type="string">
            <text:p>Y-8</text:p>
          </table:table-cell>
          <table:table-cell office:value-type="float" office:value="8" calcext:value-type="float">
            <text:p>8</text:p>
          </table:table-cell>
          <table:table-cell office:value-type="string" calcext:value-type="string">
            <text:p>ヴィジェ＝ルブラン</text:p>
          </table:table-cell>
          <table:table-cell office:value-type="string" calcext:value-type="string">
            <text:p>ゔぃじぇるぶらん</text:p>
          </table:table-cell>
          <table:table-cell office:value-type="string" calcext:value-type="string">
            <text:p>三国の英傑デッキ</text:p>
          </table:table-cell>
          <table:table-cell table:formula="of:=VLOOKUP([.G128];[$収録番号.$A$1:$収録番号.$B$9];2;0)" office:value-type="float" office:value="20" calcext:value-type="float">
            <text:p>20</text:p>
          </table:table-cell>
          <table:table-cell office:value-type="string" calcext:value-type="string">
            <text:p>N</text:p>
          </table:table-cell>
          <table:table-cell table:formula="of:=VLOOKUP([.I128];[$レアリティ番号.$A$1:$レアリティ番号.$B$4];2;0)" office:value-type="float" office:value="1" calcext:value-type="float">
            <text:p>1</text:p>
          </table:table-cell>
          <table:table-cell office:value-type="string" calcext:value-type="string">
            <text:p>イジン</text:p>
          </table:table-cell>
          <table:table-cell table:formula="of:=VLOOKUP([.K128];[$種類番号.$A$1:$種類番号.$B$4];2;0)" office:value-type="float" office:value="1" calcext:value-type="float">
            <text:p>1</text:p>
          </table:table-cell>
          <table:table-cell office:value-type="string" calcext:value-type="string">
            <text:p>黄</text:p>
          </table:table-cell>
          <table:table-cell table:formula="of:=VLOOKUP([.M128];[$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8];[$能力語番号.$A$1:$能力語番号.$B$10];2;0);0)" office:value-type="float" office:value="0" calcext:value-type="float">
            <text:p>0</text:p>
          </table:table-cell>
          <table:table-cell office:value-type="string" calcext:value-type="string">
            <text:p>美術</text:p>
          </table:table-cell>
          <table:table-cell table:formula="of:=IFERROR(VLOOKUP([.$S128];[$特性番号.$A$1:$特性番号.$B$8];2;0);0)" office:value-type="float" office:value="2" calcext:value-type="float">
            <text:p>2</text:p>
          </table:table-cell>
          <table:table-cell office:value-type="string" calcext:value-type="string">
            <text:p>戦場に置かれたとき、自分の戦場のガーディアン1体を墓地に置いて、自分の山札の上から1枚をガーディアンにして戦場に置く。</text:p>
          </table:table-cell>
          <table:table-cell table:style-name="ce8" office:value-type="string" calcext:value-type="string">
            <text:p>1ドローする</text:p>
          </table:table-cell>
          <table:table-cell table:formula="of:=IFERROR(VLOOKUP([.$V128];[$遺業能力番号.$A$1:$遺業能力番号.$B$9];2;0);0)" office:value-type="float" office:value="4" calcext:value-type="float">
            <text:p>4</text:p>
          </table:table-cell>
          <table:table-cell office:value-type="string" calcext:value-type="string">
            <text:p>https://one-draw.jp/ijinden/cardlist/Y01/card/02_Y_008.png</text:p>
          </table:table-cell>
          <table:table-cell table:formula="of:=CONCATENATE([$JSON.$A$1];[.$C128];[$JSON.$B$1];[.$E128];[$JSON.$C$1];[.$F128];[$JSON.$D$1];IF(ISNA([.$S128]);&quot;null&quot;;&quot;&quot;&quot;&quot;&amp;[.$S128]&amp;&quot;&quot;&quot;&quot;);[$JSON.$E$1];[.$U128];[$JSON.$F$1];IF(ISNA([.$V128]);&quot;null&quot;;&quot;&quot;&quot;&quot;&amp;[.$V128]&amp;&quot;&quot;&quot;&quot;);[$JSON.$G$1];[.$X128];[$JSON.$H$1];[.$H128];[$JSON.$I$1];[.J128];[$JSON.$J$1];[.$L128];[$JSON.$K$1];[.$O128];[$JSON.$L$1];[.$N128];[$JSON.$M$1];[.$R128];[$JSON.$N$1];[.$T128];[$JSON.$O$1];[.$W128];[$JSON.$P$1];[.$A128];[$JSON.$Q$1];[.$B128];[$JSON.$R$1])" office:value-type="string" office:string-value="{&quot;id&quot;:&quot;Y-8&quot;,&quot;name&quot;:&quot;ヴィジェ＝ルブラン&quot;,&quot;kana&quot;:&quot;ゔぃじぇるぶらん&quot;,&quot;traitText&quot;:&quot;美術&quot;,&quot;ruleText&quot;:&quot;戦場に置かれたとき、自分の戦場のガーディアン1体を墓地に置いて、自分の山札の上から1枚をガーディアンにして戦場に置く。&quot;,&quot;legacyText&quot;:&quot;1ドローする&quot;,&quot;imageUrl&quot;:&quot;https://one-draw.jp/ijinden/cardlist/Y01/card/02_Y_008.png&quot;,&quot;expansion&quot;:20,&quot;rarity&quot;:1,&quot;type&quot;:1,&quot;level&quot;:1,&quot;color&quot;:8,&quot;term&quot;:0,&quot;trait&quot;:2,&quot;legacy&quot;:4,&quot;orderTable&quot;:127,&quot;orderDeck&quot;:15}," calcext:value-type="string">
            <text:p>{"id":"Y-8","name":"ヴィジェ＝ルブラン","kana":"ゔぃじぇるぶらん","traitText":"美術","ruleText":"戦場に置かれたとき、自分の戦場のガーディアン1体を墓地に置いて、自分の山札の上から1枚をガーディアンにして戦場に置く。","legacyText":"1ドローする","imageUrl":"https://one-draw.jp/ijinden/cardlist/Y01/card/02_Y_008.png","expansion":20,"rarity":1,"type":1,"level":1,"color":8,"term":0,"trait":2,"legacy":4,"orderTable":127,"orderDeck":15},</text:p>
          </table:table-cell>
          <table:table-cell table:number-columns-repeated="16347"/>
        </table:table-row>
        <table:table-row table:style-name="ro2">
          <table:table-cell office:value-type="float" office:value="128" calcext:value-type="float">
            <text:p>128</text:p>
          </table:table-cell>
          <table:table-cell office:value-type="float" office:value="255" calcext:value-type="float">
            <text:p>255</text:p>
          </table:table-cell>
          <table:table-cell office:value-type="string" calcext:value-type="string">
            <text:p>Y-9</text:p>
          </table:table-cell>
          <table:table-cell office:value-type="float" office:value="9" calcext:value-type="float">
            <text:p>9</text:p>
          </table:table-cell>
          <table:table-cell office:value-type="string" calcext:value-type="string">
            <text:p>英傑集う大河</text:p>
          </table:table-cell>
          <table:table-cell office:value-type="string" calcext:value-type="string">
            <text:p>えいけつつどうたいが</text:p>
          </table:table-cell>
          <table:table-cell office:value-type="string" calcext:value-type="string">
            <text:p>三国の英傑デッキ</text:p>
          </table:table-cell>
          <table:table-cell table:formula="of:=VLOOKUP([.G129];[$収録番号.$A$1:$収録番号.$B$9];2;0)" office:value-type="float" office:value="20" calcext:value-type="float">
            <text:p>20</text:p>
          </table:table-cell>
          <table:table-cell office:value-type="string" calcext:value-type="string">
            <text:p>N</text:p>
          </table:table-cell>
          <table:table-cell table:formula="of:=VLOOKUP([.I129];[$レアリティ番号.$A$1:$レアリティ番号.$B$4];2;0)" office:value-type="float" office:value="1" calcext:value-type="float">
            <text:p>1</text:p>
          </table:table-cell>
          <table:table-cell office:value-type="string" calcext:value-type="string">
            <text:p>ハイケイ</text:p>
          </table:table-cell>
          <table:table-cell table:formula="of:=VLOOKUP([.K129];[$種類番号.$A$1:$種類番号.$B$4];2;0)" office:value-type="float" office:value="2" calcext:value-type="float">
            <text:p>2</text:p>
          </table:table-cell>
          <table:table-cell office:value-type="string" calcext:value-type="string">
            <text:p>黄</text:p>
          </table:table-cell>
          <table:table-cell table:formula="of:=VLOOKUP([.M129];[$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9];[$特性番号.$A$1:$特性番号.$B$8];2;0);0)" office:value-type="float" office:value="0" calcext:value-type="float">
            <text:p>0</text:p>
          </table:table-cell>
          <table:table-cell office:value-type="string" calcext:value-type="string">
            <text:p>これが戦場にある間、自分の戦場の黄のイジンは「色：赤 青 緑」を得る。¶相手が3体以上でアタックしたとき、アタッカー1体を指定して発動できる。そのアタッカーをアタッカーでない状態にして、これを破壊する。</text:p>
          </table:table-cell>
          <table:table-cell table:style-name="ce8" office:value-type="string" calcext:value-type="string">
            <text:p>山札の上か下に戻す</text:p>
          </table:table-cell>
          <table:table-cell table:formula="of:=IFERROR(VLOOKUP([.$V129];[$遺業能力番号.$A$1:$遺業能力番号.$B$9];2;0);0)" office:value-type="float" office:value="7" calcext:value-type="float">
            <text:p>7</text:p>
          </table:table-cell>
          <table:table-cell office:value-type="string" calcext:value-type="string">
            <text:p>https://one-draw.jp/ijinden/cardlist/Y01/card/02_Y_009.png</text:p>
          </table:table-cell>
          <table:table-cell table:formula="of:=CONCATENATE([$JSON.$A$1];[.$C129];[$JSON.$B$1];[.$E129];[$JSON.$C$1];[.$F129];[$JSON.$D$1];IF(ISNA([.$S129]);&quot;null&quot;;&quot;&quot;&quot;&quot;&amp;[.$S129]&amp;&quot;&quot;&quot;&quot;);[$JSON.$E$1];[.$U129];[$JSON.$F$1];IF(ISNA([.$V129]);&quot;null&quot;;&quot;&quot;&quot;&quot;&amp;[.$V129]&amp;&quot;&quot;&quot;&quot;);[$JSON.$G$1];[.$X129];[$JSON.$H$1];[.$H129];[$JSON.$I$1];[.J129];[$JSON.$J$1];[.$L129];[$JSON.$K$1];[.$O129];[$JSON.$L$1];[.$N129];[$JSON.$M$1];[.$R129];[$JSON.$N$1];[.$T129];[$JSON.$O$1];[.$W129];[$JSON.$P$1];[.$A129];[$JSON.$Q$1];[.$B129];[$JSON.$R$1])" office:value-type="string" office:string-value="{&quot;id&quot;:&quot;Y-9&quot;,&quot;name&quot;:&quot;英傑集う大河&quot;,&quot;kana&quot;:&quot;えいけつつどうたいが&quot;,&quot;traitText&quot;:null,&quot;ruleText&quot;:&quot;これが戦場にある間、自分の戦場の黄のイジンは「色：赤 青 緑」を得る。¶相手が3体以上でアタックしたとき、アタッカー1体を指定して発動できる。そのアタッカーをアタッカーでない状態にして、これを破壊する。&quot;,&quot;legacyText&quot;:&quot;山札の上か下に戻す&quot;,&quot;imageUrl&quot;:&quot;https://one-draw.jp/ijinden/cardlist/Y01/card/02_Y_009.png&quot;,&quot;expansion&quot;:20,&quot;rarity&quot;:1,&quot;type&quot;:2,&quot;level&quot;:3,&quot;color&quot;:8,&quot;term&quot;:0,&quot;trait&quot;:0,&quot;legacy&quot;:7,&quot;orderTable&quot;:128,&quot;orderDeck&quot;:255}," calcext:value-type="string">
            <text:p>{"id":"Y-9","name":"英傑集う大河","kana":"えいけつつどうたいが","traitText":null,"ruleText":"これが戦場にある間、自分の戦場の黄のイジンは「色：赤 青 緑」を得る。¶相手が3体以上でアタックしたとき、アタッカー1体を指定して発動できる。そのアタッカーをアタッカーでない状態にして、これを破壊する。","legacyText":"山札の上か下に戻す","imageUrl":"https://one-draw.jp/ijinden/cardlist/Y01/card/02_Y_009.png","expansion":20,"rarity":1,"type":2,"level":3,"color":8,"term":0,"trait":0,"legacy":7,"orderTable":128,"orderDeck":255},</text:p>
          </table:table-cell>
          <table:table-cell table:number-columns-repeated="16347"/>
        </table:table-row>
        <table:table-row table:style-name="ro2">
          <table:table-cell office:value-type="float" office:value="129" calcext:value-type="float">
            <text:p>129</text:p>
          </table:table-cell>
          <table:table-cell office:value-type="float" office:value="245" calcext:value-type="float">
            <text:p>245</text:p>
          </table:table-cell>
          <table:table-cell office:value-type="string" calcext:value-type="string">
            <text:p>Y-10</text:p>
          </table:table-cell>
          <table:table-cell office:value-type="float" office:value="10" calcext:value-type="float">
            <text:p>10</text:p>
          </table:table-cell>
          <table:table-cell office:value-type="string" calcext:value-type="string">
            <text:p>地上の紫微垣</text:p>
          </table:table-cell>
          <table:table-cell office:value-type="string" calcext:value-type="string">
            <text:p>ちじょうのしびえん</text:p>
          </table:table-cell>
          <table:table-cell office:value-type="string" calcext:value-type="string">
            <text:p>三国の英傑デッキ</text:p>
          </table:table-cell>
          <table:table-cell table:formula="of:=VLOOKUP([.G130];[$収録番号.$A$1:$収録番号.$B$9];2;0)" office:value-type="float" office:value="20" calcext:value-type="float">
            <text:p>20</text:p>
          </table:table-cell>
          <table:table-cell office:value-type="string" calcext:value-type="string">
            <text:p>N</text:p>
          </table:table-cell>
          <table:table-cell table:formula="of:=VLOOKUP([.I130];[$レアリティ番号.$A$1:$レアリティ番号.$B$4];2;0)" office:value-type="float" office:value="1" calcext:value-type="float">
            <text:p>1</text:p>
          </table:table-cell>
          <table:table-cell office:value-type="string" calcext:value-type="string">
            <text:p>ハイケイ</text:p>
          </table:table-cell>
          <table:table-cell table:formula="of:=VLOOKUP([.K130];[$種類番号.$A$1:$種類番号.$B$4];2;0)" office:value-type="float" office:value="2" calcext:value-type="float">
            <text:p>2</text:p>
          </table:table-cell>
          <table:table-cell office:value-type="string" calcext:value-type="string">
            <text:p>黄</text:p>
          </table:table-cell>
          <table:table-cell table:formula="of:=VLOOKUP([.M130];[$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3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0];[$特性番号.$A$1:$特性番号.$B$8];2;0);0)" office:value-type="float" office:value="0" calcext:value-type="float">
            <text:p>0</text:p>
          </table:table-cell>
          <table:table-cell office:value-type="string" calcext:value-type="string">
            <text:p>自分のマリョク配置に際し、表向きで置く限り、自分の墓地のマリョクも選べる。</text:p>
          </table:table-cell>
          <table:table-cell table:style-name="ce8" office:value-type="string" calcext:value-type="string">
            <text:p>山札の上か下に戻す</text:p>
          </table:table-cell>
          <table:table-cell table:formula="of:=IFERROR(VLOOKUP([.$V130];[$遺業能力番号.$A$1:$遺業能力番号.$B$9];2;0);0)" office:value-type="float" office:value="7" calcext:value-type="float">
            <text:p>7</text:p>
          </table:table-cell>
          <table:table-cell office:value-type="string" calcext:value-type="string">
            <text:p>https://one-draw.jp/ijinden/cardlist/Y01/card/02_Y_010.png</text:p>
          </table:table-cell>
          <table:table-cell table:formula="of:=CONCATENATE([$JSON.$A$1];[.$C130];[$JSON.$B$1];[.$E130];[$JSON.$C$1];[.$F130];[$JSON.$D$1];IF(ISNA([.$S130]);&quot;null&quot;;&quot;&quot;&quot;&quot;&amp;[.$S130]&amp;&quot;&quot;&quot;&quot;);[$JSON.$E$1];[.$U130];[$JSON.$F$1];IF(ISNA([.$V130]);&quot;null&quot;;&quot;&quot;&quot;&quot;&amp;[.$V130]&amp;&quot;&quot;&quot;&quot;);[$JSON.$G$1];[.$X130];[$JSON.$H$1];[.$H130];[$JSON.$I$1];[.J130];[$JSON.$J$1];[.$L130];[$JSON.$K$1];[.$O130];[$JSON.$L$1];[.$N130];[$JSON.$M$1];[.$R130];[$JSON.$N$1];[.$T130];[$JSON.$O$1];[.$W130];[$JSON.$P$1];[.$A130];[$JSON.$Q$1];[.$B130];[$JSON.$R$1])" office:value-type="string" office:string-value="{&quot;id&quot;:&quot;Y-10&quot;,&quot;name&quot;:&quot;地上の紫微垣&quot;,&quot;kana&quot;:&quot;ちじょうのしびえん&quot;,&quot;traitText&quot;:null,&quot;ruleText&quot;:&quot;自分のマリョク配置に際し、表向きで置く限り、自分の墓地のマリョクも選べる。&quot;,&quot;legacyText&quot;:&quot;山札の上か下に戻す&quot;,&quot;imageUrl&quot;:&quot;https://one-draw.jp/ijinden/cardlist/Y01/card/02_Y_010.png&quot;,&quot;expansion&quot;:20,&quot;rarity&quot;:1,&quot;type&quot;:2,&quot;level&quot;:2,&quot;color&quot;:8,&quot;term&quot;:0,&quot;trait&quot;:0,&quot;legacy&quot;:7,&quot;orderTable&quot;:129,&quot;orderDeck&quot;:245}," calcext:value-type="string">
            <text:p>{"id":"Y-10","name":"地上の紫微垣","kana":"ちじょうのしびえん","traitText":null,"ruleText":"自分のマリョク配置に際し、表向きで置く限り、自分の墓地のマリョクも選べる。","legacyText":"山札の上か下に戻す","imageUrl":"https://one-draw.jp/ijinden/cardlist/Y01/card/02_Y_010.png","expansion":20,"rarity":1,"type":2,"level":2,"color":8,"term":0,"trait":0,"legacy":7,"orderTable":129,"orderDeck":245},</text:p>
          </table:table-cell>
          <table:table-cell table:number-columns-repeated="16347"/>
        </table:table-row>
        <table:table-row table:style-name="ro2">
          <table:table-cell office:value-type="float" office:value="130" calcext:value-type="float">
            <text:p>130</text:p>
          </table:table-cell>
          <table:table-cell office:value-type="float" office:value="300" calcext:value-type="float">
            <text:p>300</text:p>
          </table:table-cell>
          <table:table-cell office:value-type="string" calcext:value-type="string">
            <text:p>Y-11</text:p>
          </table:table-cell>
          <table:table-cell office:value-type="float" office:value="11" calcext:value-type="float">
            <text:p>11</text:p>
          </table:table-cell>
          <table:table-cell office:value-type="string" calcext:value-type="string">
            <text:p>ネハン</text:p>
          </table:table-cell>
          <table:table-cell office:value-type="string" calcext:value-type="string">
            <text:p>ねはん</text:p>
          </table:table-cell>
          <table:table-cell office:value-type="string" calcext:value-type="string">
            <text:p>三国の英傑デッキ</text:p>
          </table:table-cell>
          <table:table-cell table:formula="of:=VLOOKUP([.G131];[$収録番号.$A$1:$収録番号.$B$9];2;0)" office:value-type="float" office:value="20" calcext:value-type="float">
            <text:p>20</text:p>
          </table:table-cell>
          <table:table-cell office:value-type="string" calcext:value-type="string">
            <text:p>N</text:p>
          </table:table-cell>
          <table:table-cell table:formula="of:=VLOOKUP([.I131];[$レアリティ番号.$A$1:$レアリティ番号.$B$4];2;0)" office:value-type="float" office:value="1" calcext:value-type="float">
            <text:p>1</text:p>
          </table:table-cell>
          <table:table-cell office:value-type="string" calcext:value-type="string">
            <text:p>マホウ</text:p>
          </table:table-cell>
          <table:table-cell table:formula="of:=VLOOKUP([.K131];[$種類番号.$A$1:$種類番号.$B$4];2;0)" office:value-type="float" office:value="3" calcext:value-type="float">
            <text:p>3</text:p>
          </table:table-cell>
          <table:table-cell office:value-type="string" calcext:value-type="string">
            <text:p>黄</text:p>
          </table:table-cell>
          <table:table-cell table:formula="of:=VLOOKUP([.M131];[$色番号.$A$1:$色番号.$B$10];2;0)"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3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1];[$特性番号.$A$1:$特性番号.$B$8];2;0);0)" office:value-type="float" office:value="0" calcext:value-type="float">
            <text:p>0</text:p>
          </table:table-cell>
          <table:table-cell office:value-type="string" calcext:value-type="string">
            <text:p>戦場の寝ているカード1つを指定して発動できる。そのカードを山札の下に戻す。</text:p>
          </table:table-cell>
          <table:table-cell table:style-name="ce8" office:value-type="string" calcext:value-type="string">
            <text:p>冥府発動</text:p>
          </table:table-cell>
          <table:table-cell table:formula="of:=IFERROR(VLOOKUP([.$V131];[$遺業能力番号.$A$1:$遺業能力番号.$B$9];2;0);0)" office:value-type="float" office:value="2" calcext:value-type="float">
            <text:p>2</text:p>
          </table:table-cell>
          <table:table-cell office:value-type="string" calcext:value-type="string">
            <text:p>https://one-draw.jp/ijinden/cardlist/Y01/card/02_Y_011.png</text:p>
          </table:table-cell>
          <table:table-cell table:formula="of:=CONCATENATE([$JSON.$A$1];[.$C131];[$JSON.$B$1];[.$E131];[$JSON.$C$1];[.$F131];[$JSON.$D$1];IF(ISNA([.$S131]);&quot;null&quot;;&quot;&quot;&quot;&quot;&amp;[.$S131]&amp;&quot;&quot;&quot;&quot;);[$JSON.$E$1];[.$U131];[$JSON.$F$1];IF(ISNA([.$V131]);&quot;null&quot;;&quot;&quot;&quot;&quot;&amp;[.$V131]&amp;&quot;&quot;&quot;&quot;);[$JSON.$G$1];[.$X131];[$JSON.$H$1];[.$H131];[$JSON.$I$1];[.J131];[$JSON.$J$1];[.$L131];[$JSON.$K$1];[.$O131];[$JSON.$L$1];[.$N131];[$JSON.$M$1];[.$R131];[$JSON.$N$1];[.$T131];[$JSON.$O$1];[.$W131];[$JSON.$P$1];[.$A131];[$JSON.$Q$1];[.$B131];[$JSON.$R$1])" office:value-type="string" office:string-value="{&quot;id&quot;:&quot;Y-11&quot;,&quot;name&quot;:&quot;ネハン&quot;,&quot;kana&quot;:&quot;ねはん&quot;,&quot;traitText&quot;:null,&quot;ruleText&quot;:&quot;戦場の寝ているカード1つを指定して発動できる。そのカードを山札の下に戻す。&quot;,&quot;legacyText&quot;:&quot;冥府発動&quot;,&quot;imageUrl&quot;:&quot;https://one-draw.jp/ijinden/cardlist/Y01/card/02_Y_011.png&quot;,&quot;expansion&quot;:20,&quot;rarity&quot;:1,&quot;type&quot;:3,&quot;level&quot;:2,&quot;color&quot;:8,&quot;term&quot;:0,&quot;trait&quot;:0,&quot;legacy&quot;:2,&quot;orderTable&quot;:130,&quot;orderDeck&quot;:300}," calcext:value-type="string">
            <text:p>{"id":"Y-11","name":"ネハン","kana":"ねはん","traitText":null,"ruleText":"戦場の寝ているカード1つを指定して発動できる。そのカードを山札の下に戻す。","legacyText":"冥府発動","imageUrl":"https://one-draw.jp/ijinden/cardlist/Y01/card/02_Y_011.png","expansion":20,"rarity":1,"type":3,"level":2,"color":8,"term":0,"trait":0,"legacy":2,"orderTable":130,"orderDeck":300},</text:p>
          </table:table-cell>
          <table:table-cell table:number-columns-repeated="16347"/>
        </table:table-row>
        <table:table-row table:style-name="ro2">
          <table:table-cell office:value-type="float" office:value="131" calcext:value-type="float">
            <text:p>131</text:p>
          </table:table-cell>
          <table:table-cell office:value-type="float" office:value="285" calcext:value-type="float">
            <text:p>285</text:p>
          </table:table-cell>
          <table:table-cell office:value-type="string" calcext:value-type="string">
            <text:p>Y-12</text:p>
          </table:table-cell>
          <table:table-cell office:value-type="float" office:value="12" calcext:value-type="float">
            <text:p>12</text:p>
          </table:table-cell>
          <table:table-cell office:value-type="string" calcext:value-type="string">
            <text:p>レクイエム</text:p>
          </table:table-cell>
          <table:table-cell office:value-type="string" calcext:value-type="string">
            <text:p>れくいえむ</text:p>
          </table:table-cell>
          <table:table-cell office:value-type="string" calcext:value-type="string">
            <text:p>三国の英傑デッキ</text:p>
          </table:table-cell>
          <table:table-cell table:formula="of:=VLOOKUP([.G132];[$収録番号.$A$1:$収録番号.$B$9];2;0)" office:value-type="float" office:value="20" calcext:value-type="float">
            <text:p>20</text:p>
          </table:table-cell>
          <table:table-cell office:value-type="string" calcext:value-type="string">
            <text:p>N</text:p>
          </table:table-cell>
          <table:table-cell table:formula="of:=VLOOKUP([.I132];[$レアリティ番号.$A$1:$レアリティ番号.$B$4];2;0)" office:value-type="float" office:value="1" calcext:value-type="float">
            <text:p>1</text:p>
          </table:table-cell>
          <table:table-cell office:value-type="string" calcext:value-type="string">
            <text:p>マホウ</text:p>
          </table:table-cell>
          <table:table-cell table:formula="of:=VLOOKUP([.K132];[$種類番号.$A$1:$種類番号.$B$4];2;0)" office:value-type="float" office:value="3" calcext:value-type="float">
            <text:p>3</text:p>
          </table:table-cell>
          <table:table-cell office:value-type="string" calcext:value-type="string">
            <text:p>黄</text:p>
          </table:table-cell>
          <table:table-cell table:formula="of:=VLOOKUP([.M132];[$色番号.$A$1:$色番号.$B$10];2;0)" office:value-type="float" office:value="8" calcext:value-type="float">
            <text:p>8</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Q13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2];[$特性番号.$A$1:$特性番号.$B$8];2;0);0)" office:value-type="float" office:value="0" calcext:value-type="float">
            <text:p>0</text:p>
          </table:table-cell>
          <table:table-cell office:value-type="string" calcext:value-type="string">
            <text:p>墓地のマリョクでないカード4つを指定して発動できる。それらのカードすべてを山札の下に戻して、1ドローする。</text:p>
          </table:table-cell>
          <table:table-cell table:style-name="ce8" office:value-type="string" calcext:value-type="string">
            <text:p>手札に戻す</text:p>
          </table:table-cell>
          <table:table-cell table:formula="of:=IFERROR(VLOOKUP([.$V132];[$遺業能力番号.$A$1:$遺業能力番号.$B$9];2;0);0)" office:value-type="float" office:value="5" calcext:value-type="float">
            <text:p>5</text:p>
          </table:table-cell>
          <table:table-cell office:value-type="string" calcext:value-type="string">
            <text:p>https://one-draw.jp/ijinden/cardlist/Y01/card/02_Y_012.png</text:p>
          </table:table-cell>
          <table:table-cell table:formula="of:=CONCATENATE([$JSON.$A$1];[.$C132];[$JSON.$B$1];[.$E132];[$JSON.$C$1];[.$F132];[$JSON.$D$1];IF(ISNA([.$S132]);&quot;null&quot;;&quot;&quot;&quot;&quot;&amp;[.$S132]&amp;&quot;&quot;&quot;&quot;);[$JSON.$E$1];[.$U132];[$JSON.$F$1];IF(ISNA([.$V132]);&quot;null&quot;;&quot;&quot;&quot;&quot;&amp;[.$V132]&amp;&quot;&quot;&quot;&quot;);[$JSON.$G$1];[.$X132];[$JSON.$H$1];[.$H132];[$JSON.$I$1];[.J132];[$JSON.$J$1];[.$L132];[$JSON.$K$1];[.$O132];[$JSON.$L$1];[.$N132];[$JSON.$M$1];[.$R132];[$JSON.$N$1];[.$T132];[$JSON.$O$1];[.$W132];[$JSON.$P$1];[.$A132];[$JSON.$Q$1];[.$B132];[$JSON.$R$1])" office:value-type="string" office:string-value="{&quot;id&quot;:&quot;Y-12&quot;,&quot;name&quot;:&quot;レクイエム&quot;,&quot;kana&quot;:&quot;れくいえむ&quot;,&quot;traitText&quot;:null,&quot;ruleText&quot;:&quot;墓地のマリョクでないカード4つを指定して発動できる。それらのカードすべてを山札の下に戻して、1ドローする。&quot;,&quot;legacyText&quot;:&quot;手札に戻す&quot;,&quot;imageUrl&quot;:&quot;https://one-draw.jp/ijinden/cardlist/Y01/card/02_Y_012.png&quot;,&quot;expansion&quot;:20,&quot;rarity&quot;:1,&quot;type&quot;:3,&quot;level&quot;:1,&quot;color&quot;:8,&quot;term&quot;:0,&quot;trait&quot;:0,&quot;legacy&quot;:5,&quot;orderTable&quot;:131,&quot;orderDeck&quot;:285}," calcext:value-type="string">
            <text:p>{"id":"Y-12","name":"レクイエム","kana":"れくいえむ","traitText":null,"ruleText":"墓地のマリョクでないカード4つを指定して発動できる。それらのカードすべてを山札の下に戻して、1ドローする。","legacyText":"手札に戻す","imageUrl":"https://one-draw.jp/ijinden/cardlist/Y01/card/02_Y_012.png","expansion":20,"rarity":1,"type":3,"level":1,"color":8,"term":0,"trait":0,"legacy":5,"orderTable":131,"orderDeck":285},</text:p>
          </table:table-cell>
          <table:table-cell table:number-columns-repeated="16347"/>
        </table:table-row>
        <table:table-row table:style-name="ro2">
          <table:table-cell office:value-type="float" office:value="132" calcext:value-type="float">
            <text:p>132</text:p>
          </table:table-cell>
          <table:table-cell office:value-type="float" office:value="361" calcext:value-type="float">
            <text:p>361</text:p>
          </table:table-cell>
          <table:table-cell office:value-type="string" calcext:value-type="string">
            <text:p>Y-13</text:p>
          </table:table-cell>
          <table:table-cell office:value-type="float" office:value="13" calcext:value-type="float">
            <text:p>13</text:p>
          </table:table-cell>
          <table:table-cell office:value-type="string" calcext:value-type="string">
            <text:p>イエローストーン</text:p>
          </table:table-cell>
          <table:table-cell office:value-type="string" calcext:value-type="string">
            <text:p>いえろーすとーん</text:p>
          </table:table-cell>
          <table:table-cell office:value-type="string" calcext:value-type="string">
            <text:p>三国の英傑デッキ</text:p>
          </table:table-cell>
          <table:table-cell table:formula="of:=VLOOKUP([.G133];[$収録番号.$A$1:$収録番号.$B$9];2;0)" office:value-type="float" office:value="20" calcext:value-type="float">
            <text:p>20</text:p>
          </table:table-cell>
          <table:table-cell office:value-type="string" calcext:value-type="string">
            <text:p>N</text:p>
          </table:table-cell>
          <table:table-cell table:formula="of:=VLOOKUP([.I133];[$レアリティ番号.$A$1:$レアリティ番号.$B$4];2;0)" office:value-type="float" office:value="1" calcext:value-type="float">
            <text:p>1</text:p>
          </table:table-cell>
          <table:table-cell office:value-type="string" calcext:value-type="string">
            <text:p>マリョク</text:p>
          </table:table-cell>
          <table:table-cell table:formula="of:=VLOOKUP([.K133];[$種類番号.$A$1:$種類番号.$B$4];2;0)" office:value-type="float" office:value="4" calcext:value-type="float">
            <text:p>4</text:p>
          </table:table-cell>
          <table:table-cell office:value-type="string" calcext:value-type="string">
            <text:p>黄</text:p>
          </table:table-cell>
          <table:table-cell table:formula="of:=VLOOKUP([.M133];[$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3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3];[$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V133];[$遺業能力番号.$A$1:$遺業能力番号.$B$9];2;0);0)" office:value-type="float" office:value="3" calcext:value-type="float">
            <text:p>3</text:p>
          </table:table-cell>
          <table:table-cell office:value-type="string" calcext:value-type="string">
            <text:p>https://one-draw.jp/ijinden/cardlist/Y01/card/02_Y_013.png</text:p>
          </table:table-cell>
          <table:table-cell table:formula="of:=CONCATENATE([$JSON.$A$1];[.$C133];[$JSON.$B$1];[.$E133];[$JSON.$C$1];[.$F133];[$JSON.$D$1];IF(ISNA([.$S133]);&quot;null&quot;;&quot;&quot;&quot;&quot;&amp;[.$S133]&amp;&quot;&quot;&quot;&quot;);[$JSON.$E$1];[.$U133];[$JSON.$F$1];IF(ISNA([.$V133]);&quot;null&quot;;&quot;&quot;&quot;&quot;&amp;[.$V133]&amp;&quot;&quot;&quot;&quot;);[$JSON.$G$1];[.$X133];[$JSON.$H$1];[.$H133];[$JSON.$I$1];[.J133];[$JSON.$J$1];[.$L133];[$JSON.$K$1];[.$O133];[$JSON.$L$1];[.$N133];[$JSON.$M$1];[.$R133];[$JSON.$N$1];[.$T133];[$JSON.$O$1];[.$W133];[$JSON.$P$1];[.$A133];[$JSON.$Q$1];[.$B133];[$JSON.$R$1])" office:value-type="string" office:string-value="{&quot;id&quot;:&quot;Y-13&quot;,&quot;name&quot;:&quot;イエローストーン&quot;,&quot;kana&quot;:&quot;いえろーすとーん&quot;,&quot;traitText&quot;:null,&quot;ruleText&quot;:&quot;※デッキに何枚でも入れてよい。&quot;,&quot;legacyText&quot;:&quot;復元&quot;,&quot;imageUrl&quot;:&quot;https://one-draw.jp/ijinden/cardlist/Y01/card/02_Y_013.png&quot;,&quot;expansion&quot;:20,&quot;rarity&quot;:1,&quot;type&quot;:4,&quot;level&quot;:1,&quot;color&quot;:8,&quot;term&quot;:0,&quot;trait&quot;:0,&quot;legacy&quot;:3,&quot;orderTable&quot;:132,&quot;orderDeck&quot;:361}," calcext:value-type="string">
            <text:p>{"id":"Y-13","name":"イエローストーン","kana":"いえろーすとーん","traitText":null,"ruleText":"※デッキに何枚でも入れてよい。","legacyText":"復元","imageUrl":"https://one-draw.jp/ijinden/cardlist/Y01/card/02_Y_013.png","expansion":20,"rarity":1,"type":4,"level":1,"color":8,"term":0,"trait":0,"legacy":3,"orderTable":132,"orderDeck":361},</text:p>
          </table:table-cell>
          <table:table-cell table:number-columns-repeated="16347"/>
        </table:table-row>
        <table:table-row table:style-name="ro2">
          <table:table-cell office:value-type="float" office:value="133" calcext:value-type="float">
            <text:p>133</text:p>
          </table:table-cell>
          <table:table-cell office:value-type="float" office:value="69" calcext:value-type="float">
            <text:p>69</text:p>
          </table:table-cell>
          <table:table-cell office:value-type="string" calcext:value-type="string">
            <text:p>2-1</text:p>
          </table:table-cell>
          <table:table-cell office:value-type="float" office:value="1" calcext:value-type="float">
            <text:p>1</text:p>
          </table:table-cell>
          <table:table-cell office:value-type="string" calcext:value-type="string">
            <text:p>天草四郎</text:p>
          </table:table-cell>
          <table:table-cell office:value-type="string" calcext:value-type="string">
            <text:p>あまくさしろう</text:p>
          </table:table-cell>
          <table:table-cell office:value-type="string" calcext:value-type="string">
            <text:p>第２弾ブースターパック</text:p>
          </table:table-cell>
          <table:table-cell table:formula="of:=VLOOKUP([.G134];[$収録番号.$A$1:$収録番号.$B$9];2;0)" office:value-type="float" office:value="25" calcext:value-type="float">
            <text:p>25</text:p>
          </table:table-cell>
          <table:table-cell office:value-type="string" calcext:value-type="string">
            <text:p>SR</text:p>
          </table:table-cell>
          <table:table-cell table:formula="of:=VLOOKUP([.I134];[$レアリティ番号.$A$1:$レアリティ番号.$B$4];2;0)" office:value-type="float" office:value="4" calcext:value-type="float">
            <text:p>4</text:p>
          </table:table-cell>
          <table:table-cell office:value-type="string" calcext:value-type="string">
            <text:p>イジン</text:p>
          </table:table-cell>
          <table:table-cell table:formula="of:=VLOOKUP([.K134];[$種類番号.$A$1:$種類番号.$B$4];2;0)" office:value-type="float" office:value="1" calcext:value-type="float">
            <text:p>1</text:p>
          </table:table-cell>
          <table:table-cell office:value-type="string" calcext:value-type="string">
            <text:p>赤</text:p>
          </table:table-cell>
          <table:table-cell table:formula="of:=VLOOKUP([.M134];[$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決起</text:p>
          </table:table-cell>
          <table:table-cell table:formula="of:=IFERROR(VLOOKUP([.$Q134];[$能力語番号.$A$1:$能力語番号.$B$10];2;0);0)" office:value-type="float" office:value="4" calcext:value-type="float">
            <text:p>4</text:p>
          </table:table-cell>
          <table:table-cell office:value-type="string" calcext:value-type="string">
            <text:p>剣術</text:p>
          </table:table-cell>
          <table:table-cell table:formula="of:=IFERROR(VLOOKUP([.$S134];[$特性番号.$A$1:$特性番号.$B$8];2;0);0)" office:value-type="float" office:value="1" calcext:value-type="float">
            <text:p>1</text:p>
          </table:table-cell>
          <table:table-cell office:value-type="string" calcext:value-type="string">
            <text:p>決起 - マリョク配置によってカードが自分の魔力ゾーンに置かれたとき、自分の魔力ゾーンのマリョクが4つ以上なら発動できる。1ドローして、このターンのマホウ使用に際し、手札のマホウは「魔力コスト0」になる。</text:p>
          </table:table-cell>
          <table:table-cell table:style-name="ce8" office:value-type="string" calcext:value-type="string">
            <text:p>反魂</text:p>
          </table:table-cell>
          <table:table-cell table:formula="of:=IFERROR(VLOOKUP([.$V134];[$遺業能力番号.$A$1:$遺業能力番号.$B$9];2;0);0)" office:value-type="float" office:value="6" calcext:value-type="float">
            <text:p>6</text:p>
          </table:table-cell>
          <table:table-cell office:value-type="string" calcext:value-type="string">
            <text:p>https://one-draw.jp/ijinden/cardlist/002/card/02_001.png</text:p>
          </table:table-cell>
          <table:table-cell table:formula="of:=CONCATENATE([$JSON.$A$1];[.$C134];[$JSON.$B$1];[.$E134];[$JSON.$C$1];[.$F134];[$JSON.$D$1];IF(ISNA([.$S134]);&quot;null&quot;;&quot;&quot;&quot;&quot;&amp;[.$S134]&amp;&quot;&quot;&quot;&quot;);[$JSON.$E$1];[.$U134];[$JSON.$F$1];IF(ISNA([.$V134]);&quot;null&quot;;&quot;&quot;&quot;&quot;&amp;[.$V134]&amp;&quot;&quot;&quot;&quot;);[$JSON.$G$1];[.$X134];[$JSON.$H$1];[.$H134];[$JSON.$I$1];[.J134];[$JSON.$J$1];[.$L134];[$JSON.$K$1];[.$O134];[$JSON.$L$1];[.$N134];[$JSON.$M$1];[.$R134];[$JSON.$N$1];[.$T134];[$JSON.$O$1];[.$W134];[$JSON.$P$1];[.$A134];[$JSON.$Q$1];[.$B134];[$JSON.$R$1])" office:value-type="string" office:string-value="{&quot;id&quot;:&quot;2-1&quot;,&quot;name&quot;:&quot;天草四郎&quot;,&quot;kana&quot;:&quot;あまくさしろう&quot;,&quot;traitText&quot;:&quot;剣術&quot;,&quot;ruleText&quot;:&quot;決起 - マリョク配置によってカードが自分の魔力ゾーンに置かれたとき、自分の魔力ゾーンのマリョクが4つ以上なら発動できる。1ドローして、このターンのマホウ使用に際し、手札のマホウは「魔力コスト0」になる。&quot;,&quot;legacyText&quot;:&quot;反魂&quot;,&quot;imageUrl&quot;:&quot;https://one-draw.jp/ijinden/cardlist/002/card/02_001.png&quot;,&quot;expansion&quot;:25,&quot;rarity&quot;:4,&quot;type&quot;:1,&quot;level&quot;:3,&quot;color&quot;:1,&quot;term&quot;:4,&quot;trait&quot;:1,&quot;legacy&quot;:6,&quot;orderTable&quot;:133,&quot;orderDeck&quot;:69}," calcext:value-type="string">
            <text:p>{"id":"2-1","name":"天草四郎","kana":"あまくさしろう","traitText":"剣術","ruleText":"決起 - マリョク配置によってカードが自分の魔力ゾーンに置かれたとき、自分の魔力ゾーンのマリョクが4つ以上なら発動できる。1ドローして、このターンのマホウ使用に際し、手札のマホウは「魔力コスト0」になる。","legacyText":"反魂","imageUrl":"https://one-draw.jp/ijinden/cardlist/002/card/02_001.png","expansion":25,"rarity":4,"type":1,"level":3,"color":1,"term":4,"trait":1,"legacy":6,"orderTable":133,"orderDeck":69},</text:p>
          </table:table-cell>
          <table:table-cell table:number-columns-repeated="16347"/>
        </table:table-row>
        <table:table-row table:style-name="ro2">
          <table:table-cell office:value-type="float" office:value="134" calcext:value-type="float">
            <text:p>134</text:p>
          </table:table-cell>
          <table:table-cell office:value-type="float" office:value="158" calcext:value-type="float">
            <text:p>158</text:p>
          </table:table-cell>
          <table:table-cell office:value-type="string" calcext:value-type="string">
            <text:p>2-2</text:p>
          </table:table-cell>
          <table:table-cell office:value-type="float" office:value="2" calcext:value-type="float">
            <text:p>2</text:p>
          </table:table-cell>
          <table:table-cell office:value-type="string" calcext:value-type="string">
            <text:p>ピョートル大帝</text:p>
          </table:table-cell>
          <table:table-cell office:value-type="string" calcext:value-type="string">
            <text:p>ぴょーとるたいてい</text:p>
          </table:table-cell>
          <table:table-cell office:value-type="string" calcext:value-type="string">
            <text:p>第２弾ブースターパック</text:p>
          </table:table-cell>
          <table:table-cell table:formula="of:=VLOOKUP([.G135];[$収録番号.$A$1:$収録番号.$B$9];2;0)" office:value-type="float" office:value="25" calcext:value-type="float">
            <text:p>25</text:p>
          </table:table-cell>
          <table:table-cell office:value-type="string" calcext:value-type="string">
            <text:p>SR</text:p>
          </table:table-cell>
          <table:table-cell table:formula="of:=VLOOKUP([.I135];[$レアリティ番号.$A$1:$レアリティ番号.$B$4];2;0)" office:value-type="float" office:value="4" calcext:value-type="float">
            <text:p>4</text:p>
          </table:table-cell>
          <table:table-cell office:value-type="string" calcext:value-type="string">
            <text:p>イジン</text:p>
          </table:table-cell>
          <table:table-cell table:formula="of:=VLOOKUP([.K135];[$種類番号.$A$1:$種類番号.$B$4];2;0)" office:value-type="float" office:value="1" calcext:value-type="float">
            <text:p>1</text:p>
          </table:table-cell>
          <table:table-cell office:value-type="string" calcext:value-type="string">
            <text:p>青</text:p>
          </table:table-cell>
          <table:table-cell table:formula="of:=VLOOKUP([.M135];[$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徴募</text:p>
          </table:table-cell>
          <table:table-cell table:formula="of:=IFERROR(VLOOKUP([.$Q135];[$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S135];[$特性番号.$A$1:$特性番号.$B$8];2;0);0)" office:value-type="float" office:value="0" calcext:value-type="float">
            <text:p>0</text:p>
          </table:table-cell>
          <table:table-cell office:value-type="string" calcext:value-type="string">
            <text:p>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text:p>
          </table:table-cell>
          <table:table-cell table:style-name="ce8" table:formula="of:=NA()" office:value-type="string" office:string-value="" calcext:value-type="error">
            <text:p>#N/A</text:p>
          </table:table-cell>
          <table:table-cell table:formula="of:=IFERROR(VLOOKUP([.$V135];[$遺業能力番号.$A$1:$遺業能力番号.$B$9];2;0);0)" office:value-type="float" office:value="0" calcext:value-type="float">
            <text:p>0</text:p>
          </table:table-cell>
          <table:table-cell office:value-type="string" calcext:value-type="string">
            <text:p>https://one-draw.jp/ijinden/cardlist/002/card/02_002.png</text:p>
          </table:table-cell>
          <table:table-cell table:formula="of:=CONCATENATE([$JSON.$A$1];[.$C135];[$JSON.$B$1];[.$E135];[$JSON.$C$1];[.$F135];[$JSON.$D$1];IF(ISNA([.$S135]);&quot;null&quot;;&quot;&quot;&quot;&quot;&amp;[.$S135]&amp;&quot;&quot;&quot;&quot;);[$JSON.$E$1];[.$U135];[$JSON.$F$1];IF(ISNA([.$V135]);&quot;null&quot;;&quot;&quot;&quot;&quot;&amp;[.$V135]&amp;&quot;&quot;&quot;&quot;);[$JSON.$G$1];[.$X135];[$JSON.$H$1];[.$H135];[$JSON.$I$1];[.J135];[$JSON.$J$1];[.$L135];[$JSON.$K$1];[.$O135];[$JSON.$L$1];[.$N135];[$JSON.$M$1];[.$R135];[$JSON.$N$1];[.$T135];[$JSON.$O$1];[.$W135];[$JSON.$P$1];[.$A135];[$JSON.$Q$1];[.$B135];[$JSON.$R$1])" office:value-type="string" office:string-value="{&quot;id&quot;:&quot;2-2&quot;,&quot;name&quot;:&quot;ピョートル大帝&quot;,&quot;kana&quot;:&quot;ぴょーとるたいてい&quot;,&quot;traitText&quot;:null,&quot;ruleText&quot;:&quot;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quot;,&quot;legacyText&quot;:null,&quot;imageUrl&quot;:&quot;https://one-draw.jp/ijinden/cardlist/002/card/02_002.png&quot;,&quot;expansion&quot;:25,&quot;rarity&quot;:4,&quot;type&quot;:1,&quot;level&quot;:5,&quot;color&quot;:2,&quot;term&quot;:8,&quot;trait&quot;:0,&quot;legacy&quot;:0,&quot;orderTable&quot;:134,&quot;orderDeck&quot;:158}," calcext:value-type="string">
            <text:p>{"id":"2-2","name":"ピョートル大帝","kana":"ぴょーとるたいてい","traitText":null,"ruleText":"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legacyText":null,"imageUrl":"https://one-draw.jp/ijinden/cardlist/002/card/02_002.png","expansion":25,"rarity":4,"type":1,"level":5,"color":2,"term":8,"trait":0,"legacy":0,"orderTable":134,"orderDeck":158},</text:p>
          </table:table-cell>
          <table:table-cell table:number-columns-repeated="16347"/>
        </table:table-row>
        <table:table-row table:style-name="ro2">
          <table:table-cell office:value-type="float" office:value="135" calcext:value-type="float">
            <text:p>135</text:p>
          </table:table-cell>
          <table:table-cell office:value-type="float" office:value="230" calcext:value-type="float">
            <text:p>230</text:p>
          </table:table-cell>
          <table:table-cell office:value-type="string" calcext:value-type="string">
            <text:p>2-3</text:p>
          </table:table-cell>
          <table:table-cell office:value-type="float" office:value="3" calcext:value-type="float">
            <text:p>3</text:p>
          </table:table-cell>
          <table:table-cell office:value-type="string" calcext:value-type="string">
            <text:p>エイブラハム・リンカン</text:p>
          </table:table-cell>
          <table:table-cell office:value-type="string" calcext:value-type="string">
            <text:p>えいぶらはむりんかん</text:p>
          </table:table-cell>
          <table:table-cell office:value-type="string" calcext:value-type="string">
            <text:p>第２弾ブースターパック</text:p>
          </table:table-cell>
          <table:table-cell table:formula="of:=VLOOKUP([.G136];[$収録番号.$A$1:$収録番号.$B$9];2;0)" office:value-type="float" office:value="25" calcext:value-type="float">
            <text:p>25</text:p>
          </table:table-cell>
          <table:table-cell office:value-type="string" calcext:value-type="string">
            <text:p>SR</text:p>
          </table:table-cell>
          <table:table-cell table:formula="of:=VLOOKUP([.I136];[$レアリティ番号.$A$1:$レアリティ番号.$B$4];2;0)" office:value-type="float" office:value="4" calcext:value-type="float">
            <text:p>4</text:p>
          </table:table-cell>
          <table:table-cell office:value-type="string" calcext:value-type="string">
            <text:p>イジン</text:p>
          </table:table-cell>
          <table:table-cell table:formula="of:=VLOOKUP([.K136];[$種類番号.$A$1:$種類番号.$B$4];2;0)" office:value-type="float" office:value="1" calcext:value-type="float">
            <text:p>1</text:p>
          </table:table-cell>
          <table:table-cell office:value-type="string" calcext:value-type="string">
            <text:p>緑</text:p>
          </table:table-cell>
          <table:table-cell table:formula="of:=VLOOKUP([.M136];[$色番号.$A$1:$色番号.$B$10];2;0)" office:value-type="float" office:value="4" calcext:value-type="float">
            <text:p>4</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3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6];[$特性番号.$A$1:$特性番号.$B$8];2;0);0)" office:value-type="float" office:value="0" calcext:value-type="float">
            <text:p>0</text:p>
          </table:table-cell>
          <table:table-cell office:value-type="string" calcext:value-type="string">
            <text:p>「即応」を得ることができない。¶戦場に置かれたとき、戦場のガーディアンすべてを手札に戻す。¶相手のターンの間、墓地のカードは能力すべてを失う。この能力は、能力によって失われない。</text:p>
          </table:table-cell>
          <table:table-cell table:style-name="ce8" office:value-type="string" calcext:value-type="string">
            <text:p>魔力化</text:p>
          </table:table-cell>
          <table:table-cell table:formula="of:=IFERROR(VLOOKUP([.$V136];[$遺業能力番号.$A$1:$遺業能力番号.$B$9];2;0);0)" office:value-type="float" office:value="1" calcext:value-type="float">
            <text:p>1</text:p>
          </table:table-cell>
          <table:table-cell office:value-type="string" calcext:value-type="string">
            <text:p>https://one-draw.jp/ijinden/cardlist/002/card/02_003.png</text:p>
          </table:table-cell>
          <table:table-cell table:formula="of:=CONCATENATE([$JSON.$A$1];[.$C136];[$JSON.$B$1];[.$E136];[$JSON.$C$1];[.$F136];[$JSON.$D$1];IF(ISNA([.$S136]);&quot;null&quot;;&quot;&quot;&quot;&quot;&amp;[.$S136]&amp;&quot;&quot;&quot;&quot;);[$JSON.$E$1];[.$U136];[$JSON.$F$1];IF(ISNA([.$V136]);&quot;null&quot;;&quot;&quot;&quot;&quot;&amp;[.$V136]&amp;&quot;&quot;&quot;&quot;);[$JSON.$G$1];[.$X136];[$JSON.$H$1];[.$H136];[$JSON.$I$1];[.J136];[$JSON.$J$1];[.$L136];[$JSON.$K$1];[.$O136];[$JSON.$L$1];[.$N136];[$JSON.$M$1];[.$R136];[$JSON.$N$1];[.$T136];[$JSON.$O$1];[.$W136];[$JSON.$P$1];[.$A136];[$JSON.$Q$1];[.$B136];[$JSON.$R$1])" office:value-type="string" office:string-value="{&quot;id&quot;:&quot;2-3&quot;,&quot;name&quot;:&quot;エイブラハム・リンカン&quot;,&quot;kana&quot;:&quot;えいぶらはむりんかん&quot;,&quot;traitText&quot;:null,&quot;ruleText&quot;:&quot;「即応」を得ることができない。¶戦場に置かれたとき、戦場のガーディアンすべてを手札に戻す。¶相手のターンの間、墓地のカードは能力すべてを失う。この能力は、能力によって失われない。&quot;,&quot;legacyText&quot;:&quot;魔力化&quot;,&quot;imageUrl&quot;:&quot;https://one-draw.jp/ijinden/cardlist/002/card/02_003.png&quot;,&quot;expansion&quot;:25,&quot;rarity&quot;:4,&quot;type&quot;:1,&quot;level&quot;:9,&quot;color&quot;:4,&quot;term&quot;:0,&quot;trait&quot;:0,&quot;legacy&quot;:1,&quot;orderTable&quot;:135,&quot;orderDeck&quot;:230}," calcext:value-type="string">
            <text:p>{"id":"2-3","name":"エイブラハム・リンカン","kana":"えいぶらはむりんかん","traitText":null,"ruleText":"「即応」を得ることができない。¶戦場に置かれたとき、戦場のガーディアンすべてを手札に戻す。¶相手のターンの間、墓地のカードは能力すべてを失う。この能力は、能力によって失われない。","legacyText":"魔力化","imageUrl":"https://one-draw.jp/ijinden/cardlist/002/card/02_003.png","expansion":25,"rarity":4,"type":1,"level":9,"color":4,"term":0,"trait":0,"legacy":1,"orderTable":135,"orderDeck":230},</text:p>
          </table:table-cell>
          <table:table-cell table:number-columns-repeated="16347"/>
        </table:table-row>
        <table:table-row table:style-name="ro2">
          <table:table-cell office:value-type="float" office:value="136" calcext:value-type="float">
            <text:p>136</text:p>
          </table:table-cell>
          <table:table-cell office:value-type="float" office:value="224" calcext:value-type="float">
            <text:p>224</text:p>
          </table:table-cell>
          <table:table-cell office:value-type="string" calcext:value-type="string">
            <text:p>2-4</text:p>
          </table:table-cell>
          <table:table-cell office:value-type="float" office:value="4" calcext:value-type="float">
            <text:p>4</text:p>
          </table:table-cell>
          <table:table-cell office:value-type="string" calcext:value-type="string">
            <text:p>アイザック・ニュートン</text:p>
          </table:table-cell>
          <table:table-cell office:value-type="string" calcext:value-type="string">
            <text:p>あいざっくにゅーとん</text:p>
          </table:table-cell>
          <table:table-cell office:value-type="string" calcext:value-type="string">
            <text:p>第２弾ブースターパック</text:p>
          </table:table-cell>
          <table:table-cell table:formula="of:=VLOOKUP([.G137];[$収録番号.$A$1:$収録番号.$B$9];2;0)" office:value-type="float" office:value="25" calcext:value-type="float">
            <text:p>25</text:p>
          </table:table-cell>
          <table:table-cell office:value-type="string" calcext:value-type="string">
            <text:p>SR</text:p>
          </table:table-cell>
          <table:table-cell table:formula="of:=VLOOKUP([.I137];[$レアリティ番号.$A$1:$レアリティ番号.$B$4];2;0)" office:value-type="float" office:value="4" calcext:value-type="float">
            <text:p>4</text:p>
          </table:table-cell>
          <table:table-cell office:value-type="string" calcext:value-type="string">
            <text:p>イジン</text:p>
          </table:table-cell>
          <table:table-cell table:formula="of:=VLOOKUP([.K137];[$種類番号.$A$1:$種類番号.$B$4];2;0)" office:value-type="float" office:value="1" calcext:value-type="float">
            <text:p>1</text:p>
          </table:table-cell>
          <table:table-cell office:value-type="string" calcext:value-type="string">
            <text:p>黄</text:p>
          </table:table-cell>
          <table:table-cell table:formula="of:=VLOOKUP([.M137];[$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3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7];[$特性番号.$A$1:$特性番号.$B$8];2;0);0)" office:value-type="float" office:value="0" calcext:value-type="float">
            <text:p>0</text:p>
          </table:table-cell>
          <table:table-cell office:value-type="string" calcext:value-type="string">
            <text:p>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text:p>
          </table:table-cell>
          <table:table-cell table:style-name="ce8" office:value-type="string" calcext:value-type="string">
            <text:p>魔力化</text:p>
          </table:table-cell>
          <table:table-cell table:formula="of:=IFERROR(VLOOKUP([.$V137];[$遺業能力番号.$A$1:$遺業能力番号.$B$9];2;0);0)" office:value-type="float" office:value="1" calcext:value-type="float">
            <text:p>1</text:p>
          </table:table-cell>
          <table:table-cell office:value-type="string" calcext:value-type="string">
            <text:p>https://one-draw.jp/ijinden/cardlist/002/card/02_004.png</text:p>
          </table:table-cell>
          <table:table-cell table:formula="of:=CONCATENATE([$JSON.$A$1];[.$C137];[$JSON.$B$1];[.$E137];[$JSON.$C$1];[.$F137];[$JSON.$D$1];IF(ISNA([.$S137]);&quot;null&quot;;&quot;&quot;&quot;&quot;&amp;[.$S137]&amp;&quot;&quot;&quot;&quot;);[$JSON.$E$1];[.$U137];[$JSON.$F$1];IF(ISNA([.$V137]);&quot;null&quot;;&quot;&quot;&quot;&quot;&amp;[.$V137]&amp;&quot;&quot;&quot;&quot;);[$JSON.$G$1];[.$X137];[$JSON.$H$1];[.$H137];[$JSON.$I$1];[.J137];[$JSON.$J$1];[.$L137];[$JSON.$K$1];[.$O137];[$JSON.$L$1];[.$N137];[$JSON.$M$1];[.$R137];[$JSON.$N$1];[.$T137];[$JSON.$O$1];[.$W137];[$JSON.$P$1];[.$A137];[$JSON.$Q$1];[.$B137];[$JSON.$R$1])" office:value-type="string" office:string-value="{&quot;id&quot;:&quot;2-4&quot;,&quot;name&quot;:&quot;アイザック・ニュートン&quot;,&quot;kana&quot;:&quot;あいざっくにゅーとん&quot;,&quot;traitText&quot;:null,&quot;ruleText&quot;:&quot;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quot;,&quot;legacyText&quot;:&quot;魔力化&quot;,&quot;imageUrl&quot;:&quot;https://one-draw.jp/ijinden/cardlist/002/card/02_004.png&quot;,&quot;expansion&quot;:25,&quot;rarity&quot;:4,&quot;type&quot;:1,&quot;level&quot;:8,&quot;color&quot;:8,&quot;term&quot;:0,&quot;trait&quot;:0,&quot;legacy&quot;:1,&quot;orderTable&quot;:136,&quot;orderDeck&quot;:224}," calcext:value-type="string">
            <text:p>{"id":"2-4","name":"アイザック・ニュートン","kana":"あいざっくにゅーとん","traitText":null,"ruleText":"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legacyText":"魔力化","imageUrl":"https://one-draw.jp/ijinden/cardlist/002/card/02_004.png","expansion":25,"rarity":4,"type":1,"level":8,"color":8,"term":0,"trait":0,"legacy":1,"orderTable":136,"orderDeck":224},</text:p>
          </table:table-cell>
          <table:table-cell table:number-columns-repeated="16347"/>
        </table:table-row>
        <table:table-row table:style-name="ro2">
          <table:table-cell office:value-type="float" office:value="137" calcext:value-type="float">
            <text:p>137</text:p>
          </table:table-cell>
          <table:table-cell office:value-type="float" office:value="133" calcext:value-type="float">
            <text:p>133</text:p>
          </table:table-cell>
          <table:table-cell office:value-type="string" calcext:value-type="string">
            <text:p>2-5</text:p>
          </table:table-cell>
          <table:table-cell office:value-type="float" office:value="5" calcext:value-type="float">
            <text:p>5</text:p>
          </table:table-cell>
          <table:table-cell office:value-type="string" calcext:value-type="string">
            <text:p>親鸞</text:p>
          </table:table-cell>
          <table:table-cell office:value-type="string" calcext:value-type="string">
            <text:p>しんらん</text:p>
          </table:table-cell>
          <table:table-cell office:value-type="string" calcext:value-type="string">
            <text:p>第２弾ブースターパック</text:p>
          </table:table-cell>
          <table:table-cell table:formula="of:=VLOOKUP([.G138];[$収録番号.$A$1:$収録番号.$B$9];2;0)" office:value-type="float" office:value="25" calcext:value-type="float">
            <text:p>25</text:p>
          </table:table-cell>
          <table:table-cell office:value-type="string" calcext:value-type="string">
            <text:p>SR</text:p>
          </table:table-cell>
          <table:table-cell table:formula="of:=VLOOKUP([.I138];[$レアリティ番号.$A$1:$レアリティ番号.$B$4];2;0)" office:value-type="float" office:value="4" calcext:value-type="float">
            <text:p>4</text:p>
          </table:table-cell>
          <table:table-cell office:value-type="string" calcext:value-type="string">
            <text:p>イジン</text:p>
          </table:table-cell>
          <table:table-cell table:formula="of:=VLOOKUP([.K138];[$種類番号.$A$1:$種類番号.$B$4];2;0)" office:value-type="float" office:value="1" calcext:value-type="float">
            <text:p>1</text:p>
          </table:table-cell>
          <table:table-cell office:value-type="string" calcext:value-type="string">
            <text:p>黄</text:p>
          </table:table-cell>
          <table:table-cell table:formula="of:=VLOOKUP([.M138];[$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3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8];[$特性番号.$A$1:$特性番号.$B$8];2;0);0)" office:value-type="float" office:value="0" calcext:value-type="float">
            <text:p>0</text:p>
          </table:table-cell>
          <table:table-cell office:value-type="string" calcext:value-type="string">
            <text:p>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text:p>
          </table:table-cell>
          <table:table-cell table:style-name="ce8" office:value-type="string" calcext:value-type="string">
            <text:p>山札の上か下に戻す</text:p>
          </table:table-cell>
          <table:table-cell table:formula="of:=IFERROR(VLOOKUP([.$V138];[$遺業能力番号.$A$1:$遺業能力番号.$B$9];2;0);0)" office:value-type="float" office:value="7" calcext:value-type="float">
            <text:p>7</text:p>
          </table:table-cell>
          <table:table-cell office:value-type="string" calcext:value-type="string">
            <text:p>https://one-draw.jp/ijinden/cardlist/002/card/02_005.png</text:p>
          </table:table-cell>
          <table:table-cell table:formula="of:=CONCATENATE([$JSON.$A$1];[.$C138];[$JSON.$B$1];[.$E138];[$JSON.$C$1];[.$F138];[$JSON.$D$1];IF(ISNA([.$S138]);&quot;null&quot;;&quot;&quot;&quot;&quot;&amp;[.$S138]&amp;&quot;&quot;&quot;&quot;);[$JSON.$E$1];[.$U138];[$JSON.$F$1];IF(ISNA([.$V138]);&quot;null&quot;;&quot;&quot;&quot;&quot;&amp;[.$V138]&amp;&quot;&quot;&quot;&quot;);[$JSON.$G$1];[.$X138];[$JSON.$H$1];[.$H138];[$JSON.$I$1];[.J138];[$JSON.$J$1];[.$L138];[$JSON.$K$1];[.$O138];[$JSON.$L$1];[.$N138];[$JSON.$M$1];[.$R138];[$JSON.$N$1];[.$T138];[$JSON.$O$1];[.$W138];[$JSON.$P$1];[.$A138];[$JSON.$Q$1];[.$B138];[$JSON.$R$1])" office:value-type="string" office:string-value="{&quot;id&quot;:&quot;2-5&quot;,&quot;name&quot;:&quot;親鸞&quot;,&quot;kana&quot;:&quot;しんらん&quot;,&quot;traitText&quot;:null,&quot;ruleText&quot;:&quot;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quot;,&quot;legacyText&quot;:&quot;山札の上か下に戻す&quot;,&quot;imageUrl&quot;:&quot;https://one-draw.jp/ijinden/cardlist/002/card/02_005.png&quot;,&quot;expansion&quot;:25,&quot;rarity&quot;:4,&quot;type&quot;:1,&quot;level&quot;:4,&quot;color&quot;:8,&quot;term&quot;:0,&quot;trait&quot;:0,&quot;legacy&quot;:7,&quot;orderTable&quot;:137,&quot;orderDeck&quot;:133}," calcext:value-type="string">
            <text:p>{"id":"2-5","name":"親鸞","kana":"しんらん","traitText":null,"ruleText":"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legacyText":"山札の上か下に戻す","imageUrl":"https://one-draw.jp/ijinden/cardlist/002/card/02_005.png","expansion":25,"rarity":4,"type":1,"level":4,"color":8,"term":0,"trait":0,"legacy":7,"orderTable":137,"orderDeck":133},</text:p>
          </table:table-cell>
          <table:table-cell table:number-columns-repeated="16347"/>
        </table:table-row>
        <table:table-row table:style-name="ro2">
          <table:table-cell office:value-type="float" office:value="138" calcext:value-type="float">
            <text:p>138</text:p>
          </table:table-cell>
          <table:table-cell office:value-type="float" office:value="214" calcext:value-type="float">
            <text:p>214</text:p>
          </table:table-cell>
          <table:table-cell office:value-type="string" calcext:value-type="string">
            <text:p>2-6</text:p>
          </table:table-cell>
          <table:table-cell office:value-type="float" office:value="6" calcext:value-type="float">
            <text:p>6</text:p>
          </table:table-cell>
          <table:table-cell office:value-type="string" calcext:value-type="string">
            <text:p>ナポレオン・ボナパルト</text:p>
          </table:table-cell>
          <table:table-cell office:value-type="string" calcext:value-type="string">
            <text:p>なぽれおんぼなぱると</text:p>
          </table:table-cell>
          <table:table-cell office:value-type="string" calcext:value-type="string">
            <text:p>第２弾ブースターパック</text:p>
          </table:table-cell>
          <table:table-cell table:formula="of:=VLOOKUP([.G139];[$収録番号.$A$1:$収録番号.$B$9];2;0)" office:value-type="float" office:value="25" calcext:value-type="float">
            <text:p>25</text:p>
          </table:table-cell>
          <table:table-cell office:value-type="string" calcext:value-type="string">
            <text:p>SR</text:p>
          </table:table-cell>
          <table:table-cell table:formula="of:=VLOOKUP([.I139];[$レアリティ番号.$A$1:$レアリティ番号.$B$4];2;0)" office:value-type="float" office:value="4" calcext:value-type="float">
            <text:p>4</text:p>
          </table:table-cell>
          <table:table-cell office:value-type="string" calcext:value-type="string">
            <text:p>イジン</text:p>
          </table:table-cell>
          <table:table-cell table:formula="of:=VLOOKUP([.K139];[$種類番号.$A$1:$種類番号.$B$4];2;0)" office:value-type="float" office:value="1" calcext:value-type="float">
            <text:p>1</text:p>
          </table:table-cell>
          <table:table-cell office:value-type="string" calcext:value-type="string">
            <text:p>黄</text:p>
          </table:table-cell>
          <table:table-cell table:formula="of:=VLOOKUP([.M139];[$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office:value-type="string" calcext:value-type="string">
            <text:p>徴募</text:p>
          </table:table-cell>
          <table:table-cell table:formula="of:=IFERROR(VLOOKUP([.$Q139];[$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S139];[$特性番号.$A$1:$特性番号.$B$8];2;0);0)" office:value-type="float" office:value="0" calcext:value-type="float">
            <text:p>0</text:p>
          </table:table-cell>
          <table:table-cell office:value-type="string" calcext:value-type="string">
            <text:p>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text:p>
          </table:table-cell>
          <table:table-cell table:style-name="ce8" table:formula="of:=NA()" office:value-type="string" office:string-value="" calcext:value-type="error">
            <text:p>#N/A</text:p>
          </table:table-cell>
          <table:table-cell table:formula="of:=IFERROR(VLOOKUP([.$V139];[$遺業能力番号.$A$1:$遺業能力番号.$B$9];2;0);0)" office:value-type="float" office:value="0" calcext:value-type="float">
            <text:p>0</text:p>
          </table:table-cell>
          <table:table-cell office:value-type="string" calcext:value-type="string">
            <text:p>https://one-draw.jp/ijinden/cardlist/002/card/02_006.png</text:p>
          </table:table-cell>
          <table:table-cell table:formula="of:=CONCATENATE([$JSON.$A$1];[.$C139];[$JSON.$B$1];[.$E139];[$JSON.$C$1];[.$F139];[$JSON.$D$1];IF(ISNA([.$S139]);&quot;null&quot;;&quot;&quot;&quot;&quot;&amp;[.$S139]&amp;&quot;&quot;&quot;&quot;);[$JSON.$E$1];[.$U139];[$JSON.$F$1];IF(ISNA([.$V139]);&quot;null&quot;;&quot;&quot;&quot;&quot;&amp;[.$V139]&amp;&quot;&quot;&quot;&quot;);[$JSON.$G$1];[.$X139];[$JSON.$H$1];[.$H139];[$JSON.$I$1];[.J139];[$JSON.$J$1];[.$L139];[$JSON.$K$1];[.$O139];[$JSON.$L$1];[.$N139];[$JSON.$M$1];[.$R139];[$JSON.$N$1];[.$T139];[$JSON.$O$1];[.$W139];[$JSON.$P$1];[.$A139];[$JSON.$Q$1];[.$B139];[$JSON.$R$1])" office:value-type="string" office:string-value="{&quot;id&quot;:&quot;2-6&quot;,&quot;name&quot;:&quot;ナポレオン・ボナパルト&quot;,&quot;kana&quot;:&quot;なぽれおんぼなぱると&quot;,&quot;traitText&quot;:null,&quot;ruleText&quot;:&quot;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quot;,&quot;legacyText&quot;:null,&quot;imageUrl&quot;:&quot;https://one-draw.jp/ijinden/cardlist/002/card/02_006.png&quot;,&quot;expansion&quot;:25,&quot;rarity&quot;:4,&quot;type&quot;:1,&quot;level&quot;:7,&quot;color&quot;:8,&quot;term&quot;:8,&quot;trait&quot;:0,&quot;legacy&quot;:0,&quot;orderTable&quot;:138,&quot;orderDeck&quot;:214}," calcext:value-type="string">
            <text:p>{"id":"2-6","name":"ナポレオン・ボナパルト","kana":"なぽれおんぼなぱると","traitText":null,"ruleText":"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legacyText":null,"imageUrl":"https://one-draw.jp/ijinden/cardlist/002/card/02_006.png","expansion":25,"rarity":4,"type":1,"level":7,"color":8,"term":8,"trait":0,"legacy":0,"orderTable":138,"orderDeck":214},</text:p>
          </table:table-cell>
          <table:table-cell table:number-columns-repeated="16347"/>
        </table:table-row>
        <table:table-row table:style-name="ro2">
          <table:table-cell office:value-type="float" office:value="139" calcext:value-type="float">
            <text:p>139</text:p>
          </table:table-cell>
          <table:table-cell office:value-type="float" office:value="28" calcext:value-type="float">
            <text:p>28</text:p>
          </table:table-cell>
          <table:table-cell office:value-type="string" calcext:value-type="string">
            <text:p>2-7</text:p>
          </table:table-cell>
          <table:table-cell office:value-type="float" office:value="7" calcext:value-type="float">
            <text:p>7</text:p>
          </table:table-cell>
          <table:table-cell office:value-type="string" calcext:value-type="string">
            <text:p>日野富子</text:p>
          </table:table-cell>
          <table:table-cell office:value-type="string" calcext:value-type="string">
            <text:p>ひのとみこ</text:p>
          </table:table-cell>
          <table:table-cell office:value-type="string" calcext:value-type="string">
            <text:p>第２弾ブースターパック</text:p>
          </table:table-cell>
          <table:table-cell table:formula="of:=VLOOKUP([.G140];[$収録番号.$A$1:$収録番号.$B$9];2;0)" office:value-type="float" office:value="25" calcext:value-type="float">
            <text:p>25</text:p>
          </table:table-cell>
          <table:table-cell office:value-type="string" calcext:value-type="string">
            <text:p>R</text:p>
          </table:table-cell>
          <table:table-cell table:formula="of:=VLOOKUP([.I140];[$レアリティ番号.$A$1:$レアリティ番号.$B$4];2;0)" office:value-type="float" office:value="2" calcext:value-type="float">
            <text:p>2</text:p>
          </table:table-cell>
          <table:table-cell office:value-type="string" calcext:value-type="string">
            <text:p>イジン</text:p>
          </table:table-cell>
          <table:table-cell table:formula="of:=VLOOKUP([.K140];[$種類番号.$A$1:$種類番号.$B$4];2;0)" office:value-type="float" office:value="1" calcext:value-type="float">
            <text:p>1</text:p>
          </table:table-cell>
          <table:table-cell office:value-type="string" calcext:value-type="string">
            <text:p>赤</text:p>
          </table:table-cell>
          <table:table-cell table:formula="of:=VLOOKUP([.M140];[$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0];[$特性番号.$A$1:$特性番号.$B$8];2;0);0)" office:value-type="float" office:value="0" calcext:value-type="float">
            <text:p>0</text:p>
          </table:table-cell>
          <table:table-cell office:value-type="string" calcext:value-type="string">
            <text:p>『ストーン』マリョクが自分の魔力ゾーンに置かれたときに発動できる。1ドローするか、自分の山札の上から1枚を裏のまま魔力ゾーンに置く。</text:p>
          </table:table-cell>
          <table:table-cell table:style-name="ce8" office:value-type="string" calcext:value-type="string">
            <text:p>反魂</text:p>
          </table:table-cell>
          <table:table-cell table:formula="of:=IFERROR(VLOOKUP([.$V140];[$遺業能力番号.$A$1:$遺業能力番号.$B$9];2;0);0)" office:value-type="float" office:value="6" calcext:value-type="float">
            <text:p>6</text:p>
          </table:table-cell>
          <table:table-cell office:value-type="string" calcext:value-type="string">
            <text:p>https://one-draw.jp/ijinden/cardlist/002/card/02_007.png</text:p>
          </table:table-cell>
          <table:table-cell table:formula="of:=CONCATENATE([$JSON.$A$1];[.$C140];[$JSON.$B$1];[.$E140];[$JSON.$C$1];[.$F140];[$JSON.$D$1];IF(ISNA([.$S140]);&quot;null&quot;;&quot;&quot;&quot;&quot;&amp;[.$S140]&amp;&quot;&quot;&quot;&quot;);[$JSON.$E$1];[.$U140];[$JSON.$F$1];IF(ISNA([.$V140]);&quot;null&quot;;&quot;&quot;&quot;&quot;&amp;[.$V140]&amp;&quot;&quot;&quot;&quot;);[$JSON.$G$1];[.$X140];[$JSON.$H$1];[.$H140];[$JSON.$I$1];[.J140];[$JSON.$J$1];[.$L140];[$JSON.$K$1];[.$O140];[$JSON.$L$1];[.$N140];[$JSON.$M$1];[.$R140];[$JSON.$N$1];[.$T140];[$JSON.$O$1];[.$W140];[$JSON.$P$1];[.$A140];[$JSON.$Q$1];[.$B140];[$JSON.$R$1])" office:value-type="string" office:string-value="{&quot;id&quot;:&quot;2-7&quot;,&quot;name&quot;:&quot;日野富子&quot;,&quot;kana&quot;:&quot;ひのとみこ&quot;,&quot;traitText&quot;:null,&quot;ruleText&quot;:&quot;『ストーン』マリョクが自分の魔力ゾーンに置かれたときに発動できる。1ドローするか、自分の山札の上から1枚を裏のまま魔力ゾーンに置く。&quot;,&quot;legacyText&quot;:&quot;反魂&quot;,&quot;imageUrl&quot;:&quot;https://one-draw.jp/ijinden/cardlist/002/card/02_007.png&quot;,&quot;expansion&quot;:25,&quot;rarity&quot;:2,&quot;type&quot;:1,&quot;level&quot;:2,&quot;color&quot;:1,&quot;term&quot;:0,&quot;trait&quot;:0,&quot;legacy&quot;:6,&quot;orderTable&quot;:139,&quot;orderDeck&quot;:28}," calcext:value-type="string">
            <text:p>{"id":"2-7","name":"日野富子","kana":"ひのとみこ","traitText":null,"ruleText":"『ストーン』マリョクが自分の魔力ゾーンに置かれたときに発動できる。1ドローするか、自分の山札の上から1枚を裏のまま魔力ゾーンに置く。","legacyText":"反魂","imageUrl":"https://one-draw.jp/ijinden/cardlist/002/card/02_007.png","expansion":25,"rarity":2,"type":1,"level":2,"color":1,"term":0,"trait":0,"legacy":6,"orderTable":139,"orderDeck":28},</text:p>
          </table:table-cell>
          <table:table-cell table:number-columns-repeated="16347"/>
        </table:table-row>
        <table:table-row table:style-name="ro2">
          <table:table-cell office:value-type="float" office:value="140" calcext:value-type="float">
            <text:p>140</text:p>
          </table:table-cell>
          <table:table-cell office:value-type="float" office:value="234" calcext:value-type="float">
            <text:p>234</text:p>
          </table:table-cell>
          <table:table-cell office:value-type="string" calcext:value-type="string">
            <text:p>2-8</text:p>
          </table:table-cell>
          <table:table-cell office:value-type="float" office:value="8" calcext:value-type="float">
            <text:p>8</text:p>
          </table:table-cell>
          <table:table-cell office:value-type="string" calcext:value-type="string">
            <text:p>豊臣秀吉</text:p>
          </table:table-cell>
          <table:table-cell office:value-type="string" calcext:value-type="string">
            <text:p>とよとみひでよし</text:p>
          </table:table-cell>
          <table:table-cell office:value-type="string" calcext:value-type="string">
            <text:p>第２弾ブースターパック</text:p>
          </table:table-cell>
          <table:table-cell table:formula="of:=VLOOKUP([.G141];[$収録番号.$A$1:$収録番号.$B$9];2;0)" office:value-type="float" office:value="25" calcext:value-type="float">
            <text:p>25</text:p>
          </table:table-cell>
          <table:table-cell office:value-type="string" calcext:value-type="string">
            <text:p>R</text:p>
          </table:table-cell>
          <table:table-cell table:formula="of:=VLOOKUP([.I141];[$レアリティ番号.$A$1:$レアリティ番号.$B$4];2;0)" office:value-type="float" office:value="2" calcext:value-type="float">
            <text:p>2</text:p>
          </table:table-cell>
          <table:table-cell office:value-type="string" calcext:value-type="string">
            <text:p>イジン</text:p>
          </table:table-cell>
          <table:table-cell table:formula="of:=VLOOKUP([.K141];[$種類番号.$A$1:$種類番号.$B$4];2;0)" office:value-type="float" office:value="1" calcext:value-type="float">
            <text:p>1</text:p>
          </table:table-cell>
          <table:table-cell office:value-type="string" calcext:value-type="string">
            <text:p>赤</text:p>
          </table:table-cell>
          <table:table-cell table:formula="of:=VLOOKUP([.M141];[$色番号.$A$1:$色番号.$B$10];2;0)" office:value-type="float" office:value="1" calcext:value-type="float">
            <text:p>1</text:p>
          </table:table-cell>
          <table:table-cell office:value-type="float" office:value="10" calcext:value-type="float">
            <text:p>1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1];[$特性番号.$A$1:$特性番号.$B$8];2;0);0)" office:value-type="float" office:value="0" calcext:value-type="float">
            <text:p>0</text:p>
          </table:table-cell>
          <table:table-cell office:value-type="string" calcext:value-type="string">
            <text:p>これのイジン召喚に際し、これのレベルは、自分の戦場のイジンの最も高いレベルと同じだけ下がる。¶即応¶戦場に置かれたときに発動できる。追加でバトルする。</text:p>
          </table:table-cell>
          <table:table-cell table:style-name="ce8" table:formula="of:=NA()" office:value-type="string" office:string-value="" calcext:value-type="error">
            <text:p>#N/A</text:p>
          </table:table-cell>
          <table:table-cell table:formula="of:=IFERROR(VLOOKUP([.$V141];[$遺業能力番号.$A$1:$遺業能力番号.$B$9];2;0);0)" office:value-type="float" office:value="0" calcext:value-type="float">
            <text:p>0</text:p>
          </table:table-cell>
          <table:table-cell office:value-type="string" calcext:value-type="string">
            <text:p>https://one-draw.jp/ijinden/cardlist/002/card/02_008.png</text:p>
          </table:table-cell>
          <table:table-cell table:formula="of:=CONCATENATE([$JSON.$A$1];[.$C141];[$JSON.$B$1];[.$E141];[$JSON.$C$1];[.$F141];[$JSON.$D$1];IF(ISNA([.$S141]);&quot;null&quot;;&quot;&quot;&quot;&quot;&amp;[.$S141]&amp;&quot;&quot;&quot;&quot;);[$JSON.$E$1];[.$U141];[$JSON.$F$1];IF(ISNA([.$V141]);&quot;null&quot;;&quot;&quot;&quot;&quot;&amp;[.$V141]&amp;&quot;&quot;&quot;&quot;);[$JSON.$G$1];[.$X141];[$JSON.$H$1];[.$H141];[$JSON.$I$1];[.J141];[$JSON.$J$1];[.$L141];[$JSON.$K$1];[.$O141];[$JSON.$L$1];[.$N141];[$JSON.$M$1];[.$R141];[$JSON.$N$1];[.$T141];[$JSON.$O$1];[.$W141];[$JSON.$P$1];[.$A141];[$JSON.$Q$1];[.$B141];[$JSON.$R$1])" office:value-type="string" office:string-value="{&quot;id&quot;:&quot;2-8&quot;,&quot;name&quot;:&quot;豊臣秀吉&quot;,&quot;kana&quot;:&quot;とよとみひでよし&quot;,&quot;traitText&quot;:null,&quot;ruleText&quot;:&quot;これのイジン召喚に際し、これのレベルは、自分の戦場のイジンの最も高いレベルと同じだけ下がる。¶即応¶戦場に置かれたときに発動できる。追加でバトルする。&quot;,&quot;legacyText&quot;:null,&quot;imageUrl&quot;:&quot;https://one-draw.jp/ijinden/cardlist/002/card/02_008.png&quot;,&quot;expansion&quot;:25,&quot;rarity&quot;:2,&quot;type&quot;:1,&quot;level&quot;:10,&quot;color&quot;:1,&quot;term&quot;:0,&quot;trait&quot;:0,&quot;legacy&quot;:0,&quot;orderTable&quot;:140,&quot;orderDeck&quot;:234}," calcext:value-type="string">
            <text:p>{"id":"2-8","name":"豊臣秀吉","kana":"とよとみひでよし","traitText":null,"ruleText":"これのイジン召喚に際し、これのレベルは、自分の戦場のイジンの最も高いレベルと同じだけ下がる。¶即応¶戦場に置かれたときに発動できる。追加でバトルする。","legacyText":null,"imageUrl":"https://one-draw.jp/ijinden/cardlist/002/card/02_008.png","expansion":25,"rarity":2,"type":1,"level":10,"color":1,"term":0,"trait":0,"legacy":0,"orderTable":140,"orderDeck":234},</text:p>
          </table:table-cell>
          <table:table-cell table:number-columns-repeated="16347"/>
        </table:table-row>
        <table:table-row table:style-name="ro2">
          <table:table-cell office:value-type="float" office:value="141" calcext:value-type="float">
            <text:p>141</text:p>
          </table:table-cell>
          <table:table-cell office:value-type="float" office:value="148" calcext:value-type="float">
            <text:p>148</text:p>
          </table:table-cell>
          <table:table-cell office:value-type="string" calcext:value-type="string">
            <text:p>2-9</text:p>
          </table:table-cell>
          <table:table-cell office:value-type="float" office:value="9" calcext:value-type="float">
            <text:p>9</text:p>
          </table:table-cell>
          <table:table-cell office:value-type="string" calcext:value-type="string">
            <text:p>石田三成</text:p>
          </table:table-cell>
          <table:table-cell office:value-type="string" calcext:value-type="string">
            <text:p>いしだみつなり</text:p>
          </table:table-cell>
          <table:table-cell office:value-type="string" calcext:value-type="string">
            <text:p>第２弾ブースターパック</text:p>
          </table:table-cell>
          <table:table-cell table:formula="of:=VLOOKUP([.G142];[$収録番号.$A$1:$収録番号.$B$9];2;0)" office:value-type="float" office:value="25" calcext:value-type="float">
            <text:p>25</text:p>
          </table:table-cell>
          <table:table-cell office:value-type="string" calcext:value-type="string">
            <text:p>N</text:p>
          </table:table-cell>
          <table:table-cell table:formula="of:=VLOOKUP([.I142];[$レアリティ番号.$A$1:$レアリティ番号.$B$4];2;0)" office:value-type="float" office:value="1" calcext:value-type="float">
            <text:p>1</text:p>
          </table:table-cell>
          <table:table-cell office:value-type="string" calcext:value-type="string">
            <text:p>イジン</text:p>
          </table:table-cell>
          <table:table-cell table:formula="of:=VLOOKUP([.K142];[$種類番号.$A$1:$種類番号.$B$4];2;0)" office:value-type="float" office:value="1" calcext:value-type="float">
            <text:p>1</text:p>
          </table:table-cell>
          <table:table-cell office:value-type="string" calcext:value-type="string">
            <text:p>赤</text:p>
          </table:table-cell>
          <table:table-cell table:formula="of:=VLOOKUP([.M142];[$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決起</text:p>
          </table:table-cell>
          <table:table-cell table:formula="of:=IFERROR(VLOOKUP([.$Q142];[$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S142];[$特性番号.$A$1:$特性番号.$B$8];2;0);0)" office:value-type="float" office:value="0" calcext:value-type="float">
            <text:p>0</text:p>
          </table:table-cell>
          <table:table-cell office:value-type="string" calcext:value-type="string">
            <text:p>戦場に置かれたとき、マリョク配置権+1する。¶決起 - マリョク配置によってカードが自分の魔力ゾーンに置かれたとき、自分の魔力ゾーンのマリョクが4つ以上なら発動できる。1ドローするか、イジン召喚権+1する。</text:p>
          </table:table-cell>
          <table:table-cell table:style-name="ce8" office:value-type="string" calcext:value-type="string">
            <text:p>魔力化</text:p>
          </table:table-cell>
          <table:table-cell table:formula="of:=IFERROR(VLOOKUP([.$V142];[$遺業能力番号.$A$1:$遺業能力番号.$B$9];2;0);0)" office:value-type="float" office:value="1" calcext:value-type="float">
            <text:p>1</text:p>
          </table:table-cell>
          <table:table-cell office:value-type="string" calcext:value-type="string">
            <text:p>https://one-draw.jp/ijinden/cardlist/002/card/02_009.png</text:p>
          </table:table-cell>
          <table:table-cell table:formula="of:=CONCATENATE([$JSON.$A$1];[.$C142];[$JSON.$B$1];[.$E142];[$JSON.$C$1];[.$F142];[$JSON.$D$1];IF(ISNA([.$S142]);&quot;null&quot;;&quot;&quot;&quot;&quot;&amp;[.$S142]&amp;&quot;&quot;&quot;&quot;);[$JSON.$E$1];[.$U142];[$JSON.$F$1];IF(ISNA([.$V142]);&quot;null&quot;;&quot;&quot;&quot;&quot;&amp;[.$V142]&amp;&quot;&quot;&quot;&quot;);[$JSON.$G$1];[.$X142];[$JSON.$H$1];[.$H142];[$JSON.$I$1];[.J142];[$JSON.$J$1];[.$L142];[$JSON.$K$1];[.$O142];[$JSON.$L$1];[.$N142];[$JSON.$M$1];[.$R142];[$JSON.$N$1];[.$T142];[$JSON.$O$1];[.$W142];[$JSON.$P$1];[.$A142];[$JSON.$Q$1];[.$B142];[$JSON.$R$1])" office:value-type="string" office:string-value="{&quot;id&quot;:&quot;2-9&quot;,&quot;name&quot;:&quot;石田三成&quot;,&quot;kana&quot;:&quot;いしだみつなり&quot;,&quot;traitText&quot;:null,&quot;ruleText&quot;:&quot;戦場に置かれたとき、マリョク配置権+1する。¶決起 - マリョク配置によってカードが自分の魔力ゾーンに置かれたとき、自分の魔力ゾーンのマリョクが4つ以上なら発動できる。1ドローするか、イジン召喚権+1する。&quot;,&quot;legacyText&quot;:&quot;魔力化&quot;,&quot;imageUrl&quot;:&quot;https://one-draw.jp/ijinden/cardlist/002/card/02_009.png&quot;,&quot;expansion&quot;:25,&quot;rarity&quot;:1,&quot;type&quot;:1,&quot;level&quot;:5,&quot;color&quot;:1,&quot;term&quot;:4,&quot;trait&quot;:0,&quot;legacy&quot;:1,&quot;orderTable&quot;:141,&quot;orderDeck&quot;:148}," calcext:value-type="string">
            <text:p>{"id":"2-9","name":"石田三成","kana":"いしだみつなり","traitText":null,"ruleText":"戦場に置かれたとき、マリョク配置権+1する。¶決起 - マリョク配置によってカードが自分の魔力ゾーンに置かれたとき、自分の魔力ゾーンのマリョクが4つ以上なら発動できる。1ドローするか、イジン召喚権+1する。","legacyText":"魔力化","imageUrl":"https://one-draw.jp/ijinden/cardlist/002/card/02_009.png","expansion":25,"rarity":1,"type":1,"level":5,"color":1,"term":4,"trait":0,"legacy":1,"orderTable":141,"orderDeck":148},</text:p>
          </table:table-cell>
          <table:table-cell table:number-columns-repeated="16347"/>
        </table:table-row>
        <table:table-row table:style-name="ro2">
          <table:table-cell office:value-type="float" office:value="142" calcext:value-type="float">
            <text:p>142</text:p>
          </table:table-cell>
          <table:table-cell office:value-type="float" office:value="4" calcext:value-type="float">
            <text:p>4</text:p>
          </table:table-cell>
          <table:table-cell office:value-type="string" calcext:value-type="string">
            <text:p>2-10</text:p>
          </table:table-cell>
          <table:table-cell office:value-type="float" office:value="10" calcext:value-type="float">
            <text:p>10</text:p>
          </table:table-cell>
          <table:table-cell office:value-type="string" calcext:value-type="string">
            <text:p>栄西</text:p>
          </table:table-cell>
          <table:table-cell office:value-type="string" calcext:value-type="string">
            <text:p>えいさい</text:p>
          </table:table-cell>
          <table:table-cell office:value-type="string" calcext:value-type="string">
            <text:p>第２弾ブースターパック</text:p>
          </table:table-cell>
          <table:table-cell table:formula="of:=VLOOKUP([.G143];[$収録番号.$A$1:$収録番号.$B$9];2;0)" office:value-type="float" office:value="25" calcext:value-type="float">
            <text:p>25</text:p>
          </table:table-cell>
          <table:table-cell office:value-type="string" calcext:value-type="string">
            <text:p>N</text:p>
          </table:table-cell>
          <table:table-cell table:formula="of:=VLOOKUP([.I143];[$レアリティ番号.$A$1:$レアリティ番号.$B$4];2;0)" office:value-type="float" office:value="1" calcext:value-type="float">
            <text:p>1</text:p>
          </table:table-cell>
          <table:table-cell office:value-type="string" calcext:value-type="string">
            <text:p>イジン</text:p>
          </table:table-cell>
          <table:table-cell table:formula="of:=VLOOKUP([.K143];[$種類番号.$A$1:$種類番号.$B$4];2;0)" office:value-type="float" office:value="1" calcext:value-type="float">
            <text:p>1</text:p>
          </table:table-cell>
          <table:table-cell office:value-type="string" calcext:value-type="string">
            <text:p>赤</text:p>
          </table:table-cell>
          <table:table-cell table:formula="of:=VLOOKUP([.M143];[$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3];[$特性番号.$A$1:$特性番号.$B$8];2;0);0)" office:value-type="float" office:value="0" calcext:value-type="float">
            <text:p>0</text:p>
          </table:table-cell>
          <table:table-cell office:value-type="string" calcext:value-type="string">
            <text:p>自分が1体だけでアタックしたときに発動する。このターンの間、アタッカーは「ダブルプレッシャー」を得る。¶ブロック+2000</text:p>
          </table:table-cell>
          <table:table-cell table:style-name="ce8" office:value-type="string" calcext:value-type="string">
            <text:p>1ドローする</text:p>
          </table:table-cell>
          <table:table-cell table:formula="of:=IFERROR(VLOOKUP([.$V143];[$遺業能力番号.$A$1:$遺業能力番号.$B$9];2;0);0)" office:value-type="float" office:value="4" calcext:value-type="float">
            <text:p>4</text:p>
          </table:table-cell>
          <table:table-cell office:value-type="string" calcext:value-type="string">
            <text:p>https://one-draw.jp/ijinden/cardlist/002/card/02_010.png</text:p>
          </table:table-cell>
          <table:table-cell table:formula="of:=CONCATENATE([$JSON.$A$1];[.$C143];[$JSON.$B$1];[.$E143];[$JSON.$C$1];[.$F143];[$JSON.$D$1];IF(ISNA([.$S143]);&quot;null&quot;;&quot;&quot;&quot;&quot;&amp;[.$S143]&amp;&quot;&quot;&quot;&quot;);[$JSON.$E$1];[.$U143];[$JSON.$F$1];IF(ISNA([.$V143]);&quot;null&quot;;&quot;&quot;&quot;&quot;&amp;[.$V143]&amp;&quot;&quot;&quot;&quot;);[$JSON.$G$1];[.$X143];[$JSON.$H$1];[.$H143];[$JSON.$I$1];[.J143];[$JSON.$J$1];[.$L143];[$JSON.$K$1];[.$O143];[$JSON.$L$1];[.$N143];[$JSON.$M$1];[.$R143];[$JSON.$N$1];[.$T143];[$JSON.$O$1];[.$W143];[$JSON.$P$1];[.$A143];[$JSON.$Q$1];[.$B143];[$JSON.$R$1])" office:value-type="string" office:string-value="{&quot;id&quot;:&quot;2-10&quot;,&quot;name&quot;:&quot;栄西&quot;,&quot;kana&quot;:&quot;えいさい&quot;,&quot;traitText&quot;:null,&quot;ruleText&quot;:&quot;自分が1体だけでアタックしたときに発動する。このターンの間、アタッカーは「ダブルプレッシャー」を得る。¶ブロック+2000&quot;,&quot;legacyText&quot;:&quot;1ドローする&quot;,&quot;imageUrl&quot;:&quot;https://one-draw.jp/ijinden/cardlist/002/card/02_010.png&quot;,&quot;expansion&quot;:25,&quot;rarity&quot;:1,&quot;type&quot;:1,&quot;level&quot;:1,&quot;color&quot;:1,&quot;term&quot;:0,&quot;trait&quot;:0,&quot;legacy&quot;:4,&quot;orderTable&quot;:142,&quot;orderDeck&quot;:4}," calcext:value-type="string">
            <text:p>{"id":"2-10","name":"栄西","kana":"えいさい","traitText":null,"ruleText":"自分が1体だけでアタックしたときに発動する。このターンの間、アタッカーは「ダブルプレッシャー」を得る。¶ブロック+2000","legacyText":"1ドローする","imageUrl":"https://one-draw.jp/ijinden/cardlist/002/card/02_010.png","expansion":25,"rarity":1,"type":1,"level":1,"color":1,"term":0,"trait":0,"legacy":4,"orderTable":142,"orderDeck":4},</text:p>
          </table:table-cell>
          <table:table-cell table:number-columns-repeated="16347"/>
        </table:table-row>
        <table:table-row table:style-name="ro2">
          <table:table-cell office:value-type="float" office:value="143" calcext:value-type="float">
            <text:p>143</text:p>
          </table:table-cell>
          <table:table-cell office:value-type="float" office:value="70" calcext:value-type="float">
            <text:p>70</text:p>
          </table:table-cell>
          <table:table-cell office:value-type="string" calcext:value-type="string">
            <text:p>2-11</text:p>
          </table:table-cell>
          <table:table-cell office:value-type="float" office:value="11" calcext:value-type="float">
            <text:p>11</text:p>
          </table:table-cell>
          <table:table-cell office:value-type="string" calcext:value-type="string">
            <text:p>道元</text:p>
          </table:table-cell>
          <table:table-cell office:value-type="string" calcext:value-type="string">
            <text:p>どうげん</text:p>
          </table:table-cell>
          <table:table-cell office:value-type="string" calcext:value-type="string">
            <text:p>第２弾ブースターパック</text:p>
          </table:table-cell>
          <table:table-cell table:formula="of:=VLOOKUP([.G144];[$収録番号.$A$1:$収録番号.$B$9];2;0)" office:value-type="float" office:value="25" calcext:value-type="float">
            <text:p>25</text:p>
          </table:table-cell>
          <table:table-cell office:value-type="string" calcext:value-type="string">
            <text:p>N</text:p>
          </table:table-cell>
          <table:table-cell table:formula="of:=VLOOKUP([.I144];[$レアリティ番号.$A$1:$レアリティ番号.$B$4];2;0)" office:value-type="float" office:value="1" calcext:value-type="float">
            <text:p>1</text:p>
          </table:table-cell>
          <table:table-cell office:value-type="string" calcext:value-type="string">
            <text:p>イジン</text:p>
          </table:table-cell>
          <table:table-cell table:formula="of:=VLOOKUP([.K144];[$種類番号.$A$1:$種類番号.$B$4];2;0)" office:value-type="float" office:value="1" calcext:value-type="float">
            <text:p>1</text:p>
          </table:table-cell>
          <table:table-cell office:value-type="string" calcext:value-type="string">
            <text:p>赤</text:p>
          </table:table-cell>
          <table:table-cell table:formula="of:=VLOOKUP([.M144];[$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4];[$特性番号.$A$1:$特性番号.$B$8];2;0);0)" office:value-type="float" office:value="0" calcext:value-type="float">
            <text:p>0</text:p>
          </table:table-cell>
          <table:table-cell office:value-type="string" calcext:value-type="string">
            <text:p>自分が1体だけでアタックしたときに発動する。このターンの間、アタッカーは相手の戦場のイジン1体につき「アタック+3000」を得る。¶ブロック+2000</text:p>
          </table:table-cell>
          <table:table-cell table:style-name="ce8" office:value-type="string" calcext:value-type="string">
            <text:p>1ドローする</text:p>
          </table:table-cell>
          <table:table-cell table:formula="of:=IFERROR(VLOOKUP([.$V144];[$遺業能力番号.$A$1:$遺業能力番号.$B$9];2;0);0)" office:value-type="float" office:value="4" calcext:value-type="float">
            <text:p>4</text:p>
          </table:table-cell>
          <table:table-cell office:value-type="string" calcext:value-type="string">
            <text:p>https://one-draw.jp/ijinden/cardlist/002/card/02_011.png</text:p>
          </table:table-cell>
          <table:table-cell table:formula="of:=CONCATENATE([$JSON.$A$1];[.$C144];[$JSON.$B$1];[.$E144];[$JSON.$C$1];[.$F144];[$JSON.$D$1];IF(ISNA([.$S144]);&quot;null&quot;;&quot;&quot;&quot;&quot;&amp;[.$S144]&amp;&quot;&quot;&quot;&quot;);[$JSON.$E$1];[.$U144];[$JSON.$F$1];IF(ISNA([.$V144]);&quot;null&quot;;&quot;&quot;&quot;&quot;&amp;[.$V144]&amp;&quot;&quot;&quot;&quot;);[$JSON.$G$1];[.$X144];[$JSON.$H$1];[.$H144];[$JSON.$I$1];[.J144];[$JSON.$J$1];[.$L144];[$JSON.$K$1];[.$O144];[$JSON.$L$1];[.$N144];[$JSON.$M$1];[.$R144];[$JSON.$N$1];[.$T144];[$JSON.$O$1];[.$W144];[$JSON.$P$1];[.$A144];[$JSON.$Q$1];[.$B144];[$JSON.$R$1])" office:value-type="string" office:string-value="{&quot;id&quot;:&quot;2-11&quot;,&quot;name&quot;:&quot;道元&quot;,&quot;kana&quot;:&quot;どうげん&quot;,&quot;traitText&quot;:null,&quot;ruleText&quot;:&quot;自分が1体だけでアタックしたときに発動する。このターンの間、アタッカーは相手の戦場のイジン1体につき「アタック+3000」を得る。¶ブロック+2000&quot;,&quot;legacyText&quot;:&quot;1ドローする&quot;,&quot;imageUrl&quot;:&quot;https://one-draw.jp/ijinden/cardlist/002/card/02_011.png&quot;,&quot;expansion&quot;:25,&quot;rarity&quot;:1,&quot;type&quot;:1,&quot;level&quot;:3,&quot;color&quot;:1,&quot;term&quot;:0,&quot;trait&quot;:0,&quot;legacy&quot;:4,&quot;orderTable&quot;:143,&quot;orderDeck&quot;:70}," calcext:value-type="string">
            <text:p>{"id":"2-11","name":"道元","kana":"どうげん","traitText":null,"ruleText":"自分が1体だけでアタックしたときに発動する。このターンの間、アタッカーは相手の戦場のイジン1体につき「アタック+3000」を得る。¶ブロック+2000","legacyText":"1ドローする","imageUrl":"https://one-draw.jp/ijinden/cardlist/002/card/02_011.png","expansion":25,"rarity":1,"type":1,"level":3,"color":1,"term":0,"trait":0,"legacy":4,"orderTable":143,"orderDeck":70},</text:p>
          </table:table-cell>
          <table:table-cell table:number-columns-repeated="16347"/>
        </table:table-row>
        <table:table-row table:style-name="ro2">
          <table:table-cell office:value-type="float" office:value="144" calcext:value-type="float">
            <text:p>144</text:p>
          </table:table-cell>
          <table:table-cell office:value-type="float" office:value="229" calcext:value-type="float">
            <text:p>229</text:p>
          </table:table-cell>
          <table:table-cell office:value-type="string" calcext:value-type="string">
            <text:p>2-12</text:p>
          </table:table-cell>
          <table:table-cell office:value-type="float" office:value="12" calcext:value-type="float">
            <text:p>12</text:p>
          </table:table-cell>
          <table:table-cell office:value-type="string" calcext:value-type="string">
            <text:p>足利義昭</text:p>
          </table:table-cell>
          <table:table-cell office:value-type="string" calcext:value-type="string">
            <text:p>あしかがよしあき</text:p>
          </table:table-cell>
          <table:table-cell office:value-type="string" calcext:value-type="string">
            <text:p>第２弾ブースターパック</text:p>
          </table:table-cell>
          <table:table-cell table:formula="of:=VLOOKUP([.G145];[$収録番号.$A$1:$収録番号.$B$9];2;0)" office:value-type="float" office:value="25" calcext:value-type="float">
            <text:p>25</text:p>
          </table:table-cell>
          <table:table-cell office:value-type="string" calcext:value-type="string">
            <text:p>N</text:p>
          </table:table-cell>
          <table:table-cell table:formula="of:=VLOOKUP([.I145];[$レアリティ番号.$A$1:$レアリティ番号.$B$4];2;0)" office:value-type="float" office:value="1" calcext:value-type="float">
            <text:p>1</text:p>
          </table:table-cell>
          <table:table-cell office:value-type="string" calcext:value-type="string">
            <text:p>イジン</text:p>
          </table:table-cell>
          <table:table-cell table:formula="of:=VLOOKUP([.K145];[$種類番号.$A$1:$種類番号.$B$4];2;0)" office:value-type="float" office:value="1" calcext:value-type="float">
            <text:p>1</text:p>
          </table:table-cell>
          <table:table-cell office:value-type="string" calcext:value-type="string">
            <text:p>赤</text:p>
          </table:table-cell>
          <table:table-cell table:formula="of:=VLOOKUP([.M145];[$色番号.$A$1:$色番号.$B$10];2;0)" office:value-type="float" office:value="1" calcext:value-type="float">
            <text:p>1</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5];[$特性番号.$A$1:$特性番号.$B$8];2;0);0)" office:value-type="float" office:value="0" calcext:value-type="float">
            <text:p>0</text:p>
          </table:table-cell>
          <table:table-cell office:value-type="string" calcext:value-type="string">
            <text:p>アタッカーになったときに発動する。このターンの間、アタッカーは「イジンにブロックされず、破壊されない」を得る。</text:p>
          </table:table-cell>
          <table:table-cell table:style-name="ce8" office:value-type="string" calcext:value-type="string">
            <text:p>魔力化</text:p>
          </table:table-cell>
          <table:table-cell table:formula="of:=IFERROR(VLOOKUP([.$V145];[$遺業能力番号.$A$1:$遺業能力番号.$B$9];2;0);0)" office:value-type="float" office:value="1" calcext:value-type="float">
            <text:p>1</text:p>
          </table:table-cell>
          <table:table-cell office:value-type="string" calcext:value-type="string">
            <text:p>https://one-draw.jp/ijinden/cardlist/002/card/02_012.png</text:p>
          </table:table-cell>
          <table:table-cell table:formula="of:=CONCATENATE([$JSON.$A$1];[.$C145];[$JSON.$B$1];[.$E145];[$JSON.$C$1];[.$F145];[$JSON.$D$1];IF(ISNA([.$S145]);&quot;null&quot;;&quot;&quot;&quot;&quot;&amp;[.$S145]&amp;&quot;&quot;&quot;&quot;);[$JSON.$E$1];[.$U145];[$JSON.$F$1];IF(ISNA([.$V145]);&quot;null&quot;;&quot;&quot;&quot;&quot;&amp;[.$V145]&amp;&quot;&quot;&quot;&quot;);[$JSON.$G$1];[.$X145];[$JSON.$H$1];[.$H145];[$JSON.$I$1];[.J145];[$JSON.$J$1];[.$L145];[$JSON.$K$1];[.$O145];[$JSON.$L$1];[.$N145];[$JSON.$M$1];[.$R145];[$JSON.$N$1];[.$T145];[$JSON.$O$1];[.$W145];[$JSON.$P$1];[.$A145];[$JSON.$Q$1];[.$B145];[$JSON.$R$1])" office:value-type="string" office:string-value="{&quot;id&quot;:&quot;2-12&quot;,&quot;name&quot;:&quot;足利義昭&quot;,&quot;kana&quot;:&quot;あしかがよしあき&quot;,&quot;traitText&quot;:null,&quot;ruleText&quot;:&quot;アタッカーになったときに発動する。このターンの間、アタッカーは「イジンにブロックされず、破壊されない」を得る。&quot;,&quot;legacyText&quot;:&quot;魔力化&quot;,&quot;imageUrl&quot;:&quot;https://one-draw.jp/ijinden/cardlist/002/card/02_012.png&quot;,&quot;expansion&quot;:25,&quot;rarity&quot;:1,&quot;type&quot;:1,&quot;level&quot;:9,&quot;color&quot;:1,&quot;term&quot;:0,&quot;trait&quot;:0,&quot;legacy&quot;:1,&quot;orderTable&quot;:144,&quot;orderDeck&quot;:229}," calcext:value-type="string">
            <text:p>{"id":"2-12","name":"足利義昭","kana":"あしかがよしあき","traitText":null,"ruleText":"アタッカーになったときに発動する。このターンの間、アタッカーは「イジンにブロックされず、破壊されない」を得る。","legacyText":"魔力化","imageUrl":"https://one-draw.jp/ijinden/cardlist/002/card/02_012.png","expansion":25,"rarity":1,"type":1,"level":9,"color":1,"term":0,"trait":0,"legacy":1,"orderTable":144,"orderDeck":229},</text:p>
          </table:table-cell>
          <table:table-cell table:number-columns-repeated="16347"/>
        </table:table-row>
        <table:table-row table:style-name="ro2">
          <table:table-cell office:value-type="float" office:value="145" calcext:value-type="float">
            <text:p>145</text:p>
          </table:table-cell>
          <table:table-cell office:value-type="float" office:value="182" calcext:value-type="float">
            <text:p>182</text:p>
          </table:table-cell>
          <table:table-cell office:value-type="string" calcext:value-type="string">
            <text:p>2-13</text:p>
          </table:table-cell>
          <table:table-cell office:value-type="float" office:value="13" calcext:value-type="float">
            <text:p>13</text:p>
          </table:table-cell>
          <table:table-cell office:value-type="string" calcext:value-type="string">
            <text:p>毛利輝元</text:p>
          </table:table-cell>
          <table:table-cell office:value-type="string" calcext:value-type="string">
            <text:p>もうりてるもと</text:p>
          </table:table-cell>
          <table:table-cell office:value-type="string" calcext:value-type="string">
            <text:p>第２弾ブースターパック</text:p>
          </table:table-cell>
          <table:table-cell table:formula="of:=VLOOKUP([.G146];[$収録番号.$A$1:$収録番号.$B$9];2;0)" office:value-type="float" office:value="25" calcext:value-type="float">
            <text:p>25</text:p>
          </table:table-cell>
          <table:table-cell office:value-type="string" calcext:value-type="string">
            <text:p>N</text:p>
          </table:table-cell>
          <table:table-cell table:formula="of:=VLOOKUP([.I146];[$レアリティ番号.$A$1:$レアリティ番号.$B$4];2;0)" office:value-type="float" office:value="1" calcext:value-type="float">
            <text:p>1</text:p>
          </table:table-cell>
          <table:table-cell office:value-type="string" calcext:value-type="string">
            <text:p>イジン</text:p>
          </table:table-cell>
          <table:table-cell table:formula="of:=VLOOKUP([.K146];[$種類番号.$A$1:$種類番号.$B$4];2;0)" office:value-type="float" office:value="1" calcext:value-type="float">
            <text:p>1</text:p>
          </table:table-cell>
          <table:table-cell office:value-type="string" calcext:value-type="string">
            <text:p>赤</text:p>
          </table:table-cell>
          <table:table-cell table:formula="of:=VLOOKUP([.M146];[$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6];[$特性番号.$A$1:$特性番号.$B$8];2;0);0)" office:value-type="float" office:value="0" calcext:value-type="float">
            <text:p>0</text:p>
          </table:table-cell>
          <table:table-cell office:value-type="string" calcext:value-type="string">
            <text:p>即応¶戦場に置かれたとき、自分の戦場のガーディアン1体を山札の上に戻す。¶破壊されたとき、自分の山札の上から1枚をガーディアンにして戦場に置く。</text:p>
          </table:table-cell>
          <table:table-cell table:style-name="ce8" table:formula="of:=NA()" office:value-type="string" office:string-value="" calcext:value-type="error">
            <text:p>#N/A</text:p>
          </table:table-cell>
          <table:table-cell table:formula="of:=IFERROR(VLOOKUP([.$V146];[$遺業能力番号.$A$1:$遺業能力番号.$B$9];2;0);0)" office:value-type="float" office:value="0" calcext:value-type="float">
            <text:p>0</text:p>
          </table:table-cell>
          <table:table-cell office:value-type="string" calcext:value-type="string">
            <text:p>https://one-draw.jp/ijinden/cardlist/002/card/02_013.png</text:p>
          </table:table-cell>
          <table:table-cell table:formula="of:=CONCATENATE([$JSON.$A$1];[.$C146];[$JSON.$B$1];[.$E146];[$JSON.$C$1];[.$F146];[$JSON.$D$1];IF(ISNA([.$S146]);&quot;null&quot;;&quot;&quot;&quot;&quot;&amp;[.$S146]&amp;&quot;&quot;&quot;&quot;);[$JSON.$E$1];[.$U146];[$JSON.$F$1];IF(ISNA([.$V146]);&quot;null&quot;;&quot;&quot;&quot;&quot;&amp;[.$V146]&amp;&quot;&quot;&quot;&quot;);[$JSON.$G$1];[.$X146];[$JSON.$H$1];[.$H146];[$JSON.$I$1];[.J146];[$JSON.$J$1];[.$L146];[$JSON.$K$1];[.$O146];[$JSON.$L$1];[.$N146];[$JSON.$M$1];[.$R146];[$JSON.$N$1];[.$T146];[$JSON.$O$1];[.$W146];[$JSON.$P$1];[.$A146];[$JSON.$Q$1];[.$B146];[$JSON.$R$1])" office:value-type="string" office:string-value="{&quot;id&quot;:&quot;2-13&quot;,&quot;name&quot;:&quot;毛利輝元&quot;,&quot;kana&quot;:&quot;もうりてるもと&quot;,&quot;traitText&quot;:null,&quot;ruleText&quot;:&quot;即応¶戦場に置かれたとき、自分の戦場のガーディアン1体を山札の上に戻す。¶破壊されたとき、自分の山札の上から1枚をガーディアンにして戦場に置く。&quot;,&quot;legacyText&quot;:null,&quot;imageUrl&quot;:&quot;https://one-draw.jp/ijinden/cardlist/002/card/02_013.png&quot;,&quot;expansion&quot;:25,&quot;rarity&quot;:1,&quot;type&quot;:1,&quot;level&quot;:6,&quot;color&quot;:1,&quot;term&quot;:0,&quot;trait&quot;:0,&quot;legacy&quot;:0,&quot;orderTable&quot;:145,&quot;orderDeck&quot;:182}," calcext:value-type="string">
            <text:p>{"id":"2-13","name":"毛利輝元","kana":"もうりてるもと","traitText":null,"ruleText":"即応¶戦場に置かれたとき、自分の戦場のガーディアン1体を山札の上に戻す。¶破壊されたとき、自分の山札の上から1枚をガーディアンにして戦場に置く。","legacyText":null,"imageUrl":"https://one-draw.jp/ijinden/cardlist/002/card/02_013.png","expansion":25,"rarity":1,"type":1,"level":6,"color":1,"term":0,"trait":0,"legacy":0,"orderTable":145,"orderDeck":182},</text:p>
          </table:table-cell>
          <table:table-cell table:number-columns-repeated="16347"/>
        </table:table-row>
        <table:table-row table:style-name="ro2">
          <table:table-cell office:value-type="float" office:value="146" calcext:value-type="float">
            <text:p>146</text:p>
          </table:table-cell>
          <table:table-cell office:value-type="float" office:value="149" calcext:value-type="float">
            <text:p>149</text:p>
          </table:table-cell>
          <table:table-cell office:value-type="string" calcext:value-type="string">
            <text:p>2-14</text:p>
          </table:table-cell>
          <table:table-cell office:value-type="float" office:value="14" calcext:value-type="float">
            <text:p>14</text:p>
          </table:table-cell>
          <table:table-cell office:value-type="string" calcext:value-type="string">
            <text:p>北条時政</text:p>
          </table:table-cell>
          <table:table-cell office:value-type="string" calcext:value-type="string">
            <text:p>ほうじょうときまさ</text:p>
          </table:table-cell>
          <table:table-cell office:value-type="string" calcext:value-type="string">
            <text:p>第２弾ブースターパック</text:p>
          </table:table-cell>
          <table:table-cell table:formula="of:=VLOOKUP([.G147];[$収録番号.$A$1:$収録番号.$B$9];2;0)" office:value-type="float" office:value="25" calcext:value-type="float">
            <text:p>25</text:p>
          </table:table-cell>
          <table:table-cell office:value-type="string" calcext:value-type="string">
            <text:p>N</text:p>
          </table:table-cell>
          <table:table-cell table:formula="of:=VLOOKUP([.I147];[$レアリティ番号.$A$1:$レアリティ番号.$B$4];2;0)" office:value-type="float" office:value="1" calcext:value-type="float">
            <text:p>1</text:p>
          </table:table-cell>
          <table:table-cell office:value-type="string" calcext:value-type="string">
            <text:p>イジン</text:p>
          </table:table-cell>
          <table:table-cell table:formula="of:=VLOOKUP([.K147];[$種類番号.$A$1:$種類番号.$B$4];2;0)" office:value-type="float" office:value="1" calcext:value-type="float">
            <text:p>1</text:p>
          </table:table-cell>
          <table:table-cell office:value-type="string" calcext:value-type="string">
            <text:p>赤</text:p>
          </table:table-cell>
          <table:table-cell table:formula="of:=VLOOKUP([.M147];[$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7];[$能力語番号.$A$1:$能力語番号.$B$10];2;0);0)" office:value-type="float" office:value="0" calcext:value-type="float">
            <text:p>0</text:p>
          </table:table-cell>
          <table:table-cell office:value-type="string" calcext:value-type="string">
            <text:p>剣術</text:p>
          </table:table-cell>
          <table:table-cell table:formula="of:=IFERROR(VLOOKUP([.$S147];[$特性番号.$A$1:$特性番号.$B$8];2;0);0)" office:value-type="float" office:value="1" calcext:value-type="float">
            <text:p>1</text:p>
          </table:table-cell>
          <table:table-cell office:value-type="string" calcext:value-type="string">
            <text:p>アタッカーになったとき、自分の戦場のイジンとガーディアンをすきなだけ寝かせて発動できる。このターンの間、寝かせた1体につき「アタック+2000」を得る。¶パワー5000以上の間「ダブルプレッシャー」を得る。</text:p>
          </table:table-cell>
          <table:table-cell table:style-name="ce8" office:value-type="string" calcext:value-type="string">
            <text:p>1ドローする</text:p>
          </table:table-cell>
          <table:table-cell table:formula="of:=IFERROR(VLOOKUP([.$V147];[$遺業能力番号.$A$1:$遺業能力番号.$B$9];2;0);0)" office:value-type="float" office:value="4" calcext:value-type="float">
            <text:p>4</text:p>
          </table:table-cell>
          <table:table-cell office:value-type="string" calcext:value-type="string">
            <text:p>https://one-draw.jp/ijinden/cardlist/002/card/02_014.png</text:p>
          </table:table-cell>
          <table:table-cell table:formula="of:=CONCATENATE([$JSON.$A$1];[.$C147];[$JSON.$B$1];[.$E147];[$JSON.$C$1];[.$F147];[$JSON.$D$1];IF(ISNA([.$S147]);&quot;null&quot;;&quot;&quot;&quot;&quot;&amp;[.$S147]&amp;&quot;&quot;&quot;&quot;);[$JSON.$E$1];[.$U147];[$JSON.$F$1];IF(ISNA([.$V147]);&quot;null&quot;;&quot;&quot;&quot;&quot;&amp;[.$V147]&amp;&quot;&quot;&quot;&quot;);[$JSON.$G$1];[.$X147];[$JSON.$H$1];[.$H147];[$JSON.$I$1];[.J147];[$JSON.$J$1];[.$L147];[$JSON.$K$1];[.$O147];[$JSON.$L$1];[.$N147];[$JSON.$M$1];[.$R147];[$JSON.$N$1];[.$T147];[$JSON.$O$1];[.$W147];[$JSON.$P$1];[.$A147];[$JSON.$Q$1];[.$B147];[$JSON.$R$1])" office:value-type="string" office:string-value="{&quot;id&quot;:&quot;2-14&quot;,&quot;name&quot;:&quot;北条時政&quot;,&quot;kana&quot;:&quot;ほうじょうときまさ&quot;,&quot;traitText&quot;:&quot;剣術&quot;,&quot;ruleText&quot;:&quot;アタッカーになったとき、自分の戦場のイジンとガーディアンをすきなだけ寝かせて発動できる。このターンの間、寝かせた1体につき「アタック+2000」を得る。¶パワー5000以上の間「ダブルプレッシャー」を得る。&quot;,&quot;legacyText&quot;:&quot;1ドローする&quot;,&quot;imageUrl&quot;:&quot;https://one-draw.jp/ijinden/cardlist/002/card/02_014.png&quot;,&quot;expansion&quot;:25,&quot;rarity&quot;:1,&quot;type&quot;:1,&quot;level&quot;:5,&quot;color&quot;:1,&quot;term&quot;:0,&quot;trait&quot;:1,&quot;legacy&quot;:4,&quot;orderTable&quot;:146,&quot;orderDeck&quot;:149}," calcext:value-type="string">
            <text:p>{"id":"2-14","name":"北条時政","kana":"ほうじょうときまさ","traitText":"剣術","ruleText":"アタッカーになったとき、自分の戦場のイジンとガーディアンをすきなだけ寝かせて発動できる。このターンの間、寝かせた1体につき「アタック+2000」を得る。¶パワー5000以上の間「ダブルプレッシャー」を得る。","legacyText":"1ドローする","imageUrl":"https://one-draw.jp/ijinden/cardlist/002/card/02_014.png","expansion":25,"rarity":1,"type":1,"level":5,"color":1,"term":0,"trait":1,"legacy":4,"orderTable":146,"orderDeck":149},</text:p>
          </table:table-cell>
          <table:table-cell table:number-columns-repeated="16347"/>
        </table:table-row>
        <table:table-row table:style-name="ro2">
          <table:table-cell office:value-type="float" office:value="147" calcext:value-type="float">
            <text:p>147</text:p>
          </table:table-cell>
          <table:table-cell office:value-type="float" office:value="204" calcext:value-type="float">
            <text:p>204</text:p>
          </table:table-cell>
          <table:table-cell office:value-type="string" calcext:value-type="string">
            <text:p>2-15</text:p>
          </table:table-cell>
          <table:table-cell office:value-type="float" office:value="15" calcext:value-type="float">
            <text:p>15</text:p>
          </table:table-cell>
          <table:table-cell office:value-type="string" calcext:value-type="string">
            <text:p>北条時宗</text:p>
          </table:table-cell>
          <table:table-cell office:value-type="string" calcext:value-type="string">
            <text:p>ほうじょうときむね</text:p>
          </table:table-cell>
          <table:table-cell office:value-type="string" calcext:value-type="string">
            <text:p>第２弾ブースターパック</text:p>
          </table:table-cell>
          <table:table-cell table:formula="of:=VLOOKUP([.G148];[$収録番号.$A$1:$収録番号.$B$9];2;0)" office:value-type="float" office:value="25" calcext:value-type="float">
            <text:p>25</text:p>
          </table:table-cell>
          <table:table-cell office:value-type="string" calcext:value-type="string">
            <text:p>N</text:p>
          </table:table-cell>
          <table:table-cell table:formula="of:=VLOOKUP([.I148];[$レアリティ番号.$A$1:$レアリティ番号.$B$4];2;0)" office:value-type="float" office:value="1" calcext:value-type="float">
            <text:p>1</text:p>
          </table:table-cell>
          <table:table-cell office:value-type="string" calcext:value-type="string">
            <text:p>イジン</text:p>
          </table:table-cell>
          <table:table-cell table:formula="of:=VLOOKUP([.K148];[$種類番号.$A$1:$種類番号.$B$4];2;0)" office:value-type="float" office:value="1" calcext:value-type="float">
            <text:p>1</text:p>
          </table:table-cell>
          <table:table-cell office:value-type="string" calcext:value-type="string">
            <text:p>赤</text:p>
          </table:table-cell>
          <table:table-cell table:formula="of:=VLOOKUP([.M148];[$色番号.$A$1:$色番号.$B$10];2;0)" office:value-type="float" office:value="1" calcext:value-type="float">
            <text:p>1</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8];[$特性番号.$A$1:$特性番号.$B$8];2;0);0)" office:value-type="float" office:value="0" calcext:value-type="float">
            <text:p>0</text:p>
          </table:table-cell>
          <table:table-cell office:value-type="string" calcext:value-type="string">
            <text:p>即応¶ガーディアンが相手の戦場に4体以上いる間「トリプルプレッシャー」を得る。</text:p>
          </table:table-cell>
          <table:table-cell table:style-name="ce8" table:formula="of:=NA()" office:value-type="string" office:string-value="" calcext:value-type="error">
            <text:p>#N/A</text:p>
          </table:table-cell>
          <table:table-cell table:formula="of:=IFERROR(VLOOKUP([.$V148];[$遺業能力番号.$A$1:$遺業能力番号.$B$9];2;0);0)" office:value-type="float" office:value="0" calcext:value-type="float">
            <text:p>0</text:p>
          </table:table-cell>
          <table:table-cell office:value-type="string" calcext:value-type="string">
            <text:p>https://one-draw.jp/ijinden/cardlist/002/card/02_015.png</text:p>
          </table:table-cell>
          <table:table-cell table:formula="of:=CONCATENATE([$JSON.$A$1];[.$C148];[$JSON.$B$1];[.$E148];[$JSON.$C$1];[.$F148];[$JSON.$D$1];IF(ISNA([.$S148]);&quot;null&quot;;&quot;&quot;&quot;&quot;&amp;[.$S148]&amp;&quot;&quot;&quot;&quot;);[$JSON.$E$1];[.$U148];[$JSON.$F$1];IF(ISNA([.$V148]);&quot;null&quot;;&quot;&quot;&quot;&quot;&amp;[.$V148]&amp;&quot;&quot;&quot;&quot;);[$JSON.$G$1];[.$X148];[$JSON.$H$1];[.$H148];[$JSON.$I$1];[.J148];[$JSON.$J$1];[.$L148];[$JSON.$K$1];[.$O148];[$JSON.$L$1];[.$N148];[$JSON.$M$1];[.$R148];[$JSON.$N$1];[.$T148];[$JSON.$O$1];[.$W148];[$JSON.$P$1];[.$A148];[$JSON.$Q$1];[.$B148];[$JSON.$R$1])" office:value-type="string" office:string-value="{&quot;id&quot;:&quot;2-15&quot;,&quot;name&quot;:&quot;北条時宗&quot;,&quot;kana&quot;:&quot;ほうじょうときむね&quot;,&quot;traitText&quot;:null,&quot;ruleText&quot;:&quot;即応¶ガーディアンが相手の戦場に4体以上いる間「トリプルプレッシャー」を得る。&quot;,&quot;legacyText&quot;:null,&quot;imageUrl&quot;:&quot;https://one-draw.jp/ijinden/cardlist/002/card/02_015.png&quot;,&quot;expansion&quot;:25,&quot;rarity&quot;:1,&quot;type&quot;:1,&quot;level&quot;:7,&quot;color&quot;:1,&quot;term&quot;:0,&quot;trait&quot;:0,&quot;legacy&quot;:0,&quot;orderTable&quot;:147,&quot;orderDeck&quot;:204}," calcext:value-type="string">
            <text:p>{"id":"2-15","name":"北条時宗","kana":"ほうじょうときむね","traitText":null,"ruleText":"即応¶ガーディアンが相手の戦場に4体以上いる間「トリプルプレッシャー」を得る。","legacyText":null,"imageUrl":"https://one-draw.jp/ijinden/cardlist/002/card/02_015.png","expansion":25,"rarity":1,"type":1,"level":7,"color":1,"term":0,"trait":0,"legacy":0,"orderTable":147,"orderDeck":204},</text:p>
          </table:table-cell>
          <table:table-cell table:number-columns-repeated="16347"/>
        </table:table-row>
        <table:table-row table:style-name="ro2">
          <table:table-cell office:value-type="float" office:value="148" calcext:value-type="float">
            <text:p>148</text:p>
          </table:table-cell>
          <table:table-cell office:value-type="float" office:value="37" calcext:value-type="float">
            <text:p>37</text:p>
          </table:table-cell>
          <table:table-cell office:value-type="string" calcext:value-type="string">
            <text:p>2-16</text:p>
          </table:table-cell>
          <table:table-cell office:value-type="float" office:value="16" calcext:value-type="float">
            <text:p>16</text:p>
          </table:table-cell>
          <table:table-cell office:value-type="string" calcext:value-type="string">
            <text:p>シャルル・ド・モンテスキュー</text:p>
          </table:table-cell>
          <table:table-cell office:value-type="string" calcext:value-type="string">
            <text:p>しゃるるどもんてすきゅー</text:p>
          </table:table-cell>
          <table:table-cell office:value-type="string" calcext:value-type="string">
            <text:p>第２弾ブースターパック</text:p>
          </table:table-cell>
          <table:table-cell table:formula="of:=VLOOKUP([.G149];[$収録番号.$A$1:$収録番号.$B$9];2;0)" office:value-type="float" office:value="25" calcext:value-type="float">
            <text:p>25</text:p>
          </table:table-cell>
          <table:table-cell office:value-type="string" calcext:value-type="string">
            <text:p>N</text:p>
          </table:table-cell>
          <table:table-cell table:formula="of:=VLOOKUP([.I149];[$レアリティ番号.$A$1:$レアリティ番号.$B$4];2;0)" office:value-type="float" office:value="1" calcext:value-type="float">
            <text:p>1</text:p>
          </table:table-cell>
          <table:table-cell office:value-type="string" calcext:value-type="string">
            <text:p>イジン</text:p>
          </table:table-cell>
          <table:table-cell table:formula="of:=VLOOKUP([.K149];[$種類番号.$A$1:$種類番号.$B$4];2;0)" office:value-type="float" office:value="1" calcext:value-type="float">
            <text:p>1</text:p>
          </table:table-cell>
          <table:table-cell office:value-type="string" calcext:value-type="string">
            <text:p>青</text:p>
          </table:table-cell>
          <table:table-cell table:formula="of:=VLOOKUP([.M149];[$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9];[$能力語番号.$A$1:$能力語番号.$B$10];2;0);0)" office:value-type="float" office:value="0" calcext:value-type="float">
            <text:p>0</text:p>
          </table:table-cell>
          <table:table-cell office:value-type="string" calcext:value-type="string">
            <text:p>思想</text:p>
          </table:table-cell>
          <table:table-cell table:formula="of:=IFERROR(VLOOKUP([.$S149];[$特性番号.$A$1:$特性番号.$B$8];2;0);0)" office:value-type="float" office:value="8" calcext:value-type="float">
            <text:p>8</text:p>
          </table:table-cell>
          <table:table-cell office:value-type="string" calcext:value-type="string">
            <text:p>相手の戦場に2色以上ある間、自分の戦場の「思想」カードは「能力によって破壊されない」を得る。¶相手の戦場に3色以上ある間、自分の戦場の「思想」カードは「能力によって戦場を離れない」を得る。</text:p>
          </table:table-cell>
          <table:table-cell table:style-name="ce8" office:value-type="string" calcext:value-type="string">
            <text:p>1ドローする</text:p>
          </table:table-cell>
          <table:table-cell table:formula="of:=IFERROR(VLOOKUP([.$V149];[$遺業能力番号.$A$1:$遺業能力番号.$B$9];2;0);0)" office:value-type="float" office:value="4" calcext:value-type="float">
            <text:p>4</text:p>
          </table:table-cell>
          <table:table-cell office:value-type="string" calcext:value-type="string">
            <text:p>https://one-draw.jp/ijinden/cardlist/002/card/02_016.png</text:p>
          </table:table-cell>
          <table:table-cell table:formula="of:=CONCATENATE([$JSON.$A$1];[.$C149];[$JSON.$B$1];[.$E149];[$JSON.$C$1];[.$F149];[$JSON.$D$1];IF(ISNA([.$S149]);&quot;null&quot;;&quot;&quot;&quot;&quot;&amp;[.$S149]&amp;&quot;&quot;&quot;&quot;);[$JSON.$E$1];[.$U149];[$JSON.$F$1];IF(ISNA([.$V149]);&quot;null&quot;;&quot;&quot;&quot;&quot;&amp;[.$V149]&amp;&quot;&quot;&quot;&quot;);[$JSON.$G$1];[.$X149];[$JSON.$H$1];[.$H149];[$JSON.$I$1];[.J149];[$JSON.$J$1];[.$L149];[$JSON.$K$1];[.$O149];[$JSON.$L$1];[.$N149];[$JSON.$M$1];[.$R149];[$JSON.$N$1];[.$T149];[$JSON.$O$1];[.$W149];[$JSON.$P$1];[.$A149];[$JSON.$Q$1];[.$B149];[$JSON.$R$1])" office:value-type="string" office:string-value="{&quot;id&quot;:&quot;2-16&quot;,&quot;name&quot;:&quot;シャルル・ド・モンテスキュー&quot;,&quot;kana&quot;:&quot;しゃるるどもんてすきゅー&quot;,&quot;traitText&quot;:&quot;思想&quot;,&quot;ruleText&quot;:&quot;相手の戦場に2色以上ある間、自分の戦場の「思想」カードは「能力によって破壊されない」を得る。¶相手の戦場に3色以上ある間、自分の戦場の「思想」カードは「能力によって戦場を離れない」を得る。&quot;,&quot;legacyText&quot;:&quot;1ドローする&quot;,&quot;imageUrl&quot;:&quot;https://one-draw.jp/ijinden/cardlist/002/card/02_016.png&quot;,&quot;expansion&quot;:25,&quot;rarity&quot;:1,&quot;type&quot;:1,&quot;level&quot;:2,&quot;color&quot;:2,&quot;term&quot;:0,&quot;trait&quot;:8,&quot;legacy&quot;:4,&quot;orderTable&quot;:148,&quot;orderDeck&quot;:37}," calcext:value-type="string">
            <text:p>{"id":"2-16","name":"シャルル・ド・モンテスキュー","kana":"しゃるるどもんてすきゅー","traitText":"思想","ruleText":"相手の戦場に2色以上ある間、自分の戦場の「思想」カードは「能力によって破壊されない」を得る。¶相手の戦場に3色以上ある間、自分の戦場の「思想」カードは「能力によって戦場を離れない」を得る。","legacyText":"1ドローする","imageUrl":"https://one-draw.jp/ijinden/cardlist/002/card/02_016.png","expansion":25,"rarity":1,"type":1,"level":2,"color":2,"term":0,"trait":8,"legacy":4,"orderTable":148,"orderDeck":37},</text:p>
          </table:table-cell>
          <table:table-cell table:number-columns-repeated="16347"/>
        </table:table-row>
        <table:table-row table:style-name="ro2">
          <table:table-cell office:value-type="float" office:value="149" calcext:value-type="float">
            <text:p>149</text:p>
          </table:table-cell>
          <table:table-cell office:value-type="float" office:value="80" calcext:value-type="float">
            <text:p>80</text:p>
          </table:table-cell>
          <table:table-cell office:value-type="string" calcext:value-type="string">
            <text:p>2-17</text:p>
          </table:table-cell>
          <table:table-cell office:value-type="float" office:value="17" calcext:value-type="float">
            <text:p>17</text:p>
          </table:table-cell>
          <table:table-cell office:value-type="string" calcext:value-type="string">
            <text:p>ジャン＝ジャック・ルソー</text:p>
          </table:table-cell>
          <table:table-cell office:value-type="string" calcext:value-type="string">
            <text:p>じゃんじゃっくるそー</text:p>
          </table:table-cell>
          <table:table-cell office:value-type="string" calcext:value-type="string">
            <text:p>第２弾ブースターパック</text:p>
          </table:table-cell>
          <table:table-cell table:formula="of:=VLOOKUP([.G150];[$収録番号.$A$1:$収録番号.$B$9];2;0)" office:value-type="float" office:value="25" calcext:value-type="float">
            <text:p>25</text:p>
          </table:table-cell>
          <table:table-cell office:value-type="string" calcext:value-type="string">
            <text:p>N</text:p>
          </table:table-cell>
          <table:table-cell table:formula="of:=VLOOKUP([.I150];[$レアリティ番号.$A$1:$レアリティ番号.$B$4];2;0)" office:value-type="float" office:value="1" calcext:value-type="float">
            <text:p>1</text:p>
          </table:table-cell>
          <table:table-cell office:value-type="string" calcext:value-type="string">
            <text:p>イジン</text:p>
          </table:table-cell>
          <table:table-cell table:formula="of:=VLOOKUP([.K150];[$種類番号.$A$1:$種類番号.$B$4];2;0)" office:value-type="float" office:value="1" calcext:value-type="float">
            <text:p>1</text:p>
          </table:table-cell>
          <table:table-cell office:value-type="string" calcext:value-type="string">
            <text:p>青</text:p>
          </table:table-cell>
          <table:table-cell table:formula="of:=VLOOKUP([.M150];[$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0];[$能力語番号.$A$1:$能力語番号.$B$10];2;0);0)" office:value-type="float" office:value="0" calcext:value-type="float">
            <text:p>0</text:p>
          </table:table-cell>
          <table:table-cell office:value-type="string" calcext:value-type="string">
            <text:p>思想</text:p>
          </table:table-cell>
          <table:table-cell table:formula="of:=IFERROR(VLOOKUP([.$S150];[$特性番号.$A$1:$特性番号.$B$8];2;0);0)" office:value-type="float" office:value="8" calcext:value-type="float">
            <text:p>8</text:p>
          </table:table-cell>
          <table:table-cell office:value-type="string" calcext:value-type="string">
            <text:p>戦場に置かれたとき、自分の手札1枚を墓地に置いて、戦場で最も高いパワーを持つイジン1体を破壊する。</text:p>
          </table:table-cell>
          <table:table-cell table:style-name="ce8" office:value-type="string" calcext:value-type="string">
            <text:p>1ドローする</text:p>
          </table:table-cell>
          <table:table-cell table:formula="of:=IFERROR(VLOOKUP([.$V150];[$遺業能力番号.$A$1:$遺業能力番号.$B$9];2;0);0)" office:value-type="float" office:value="4" calcext:value-type="float">
            <text:p>4</text:p>
          </table:table-cell>
          <table:table-cell office:value-type="string" calcext:value-type="string">
            <text:p>https://one-draw.jp/ijinden/cardlist/002/card/02_017.png</text:p>
          </table:table-cell>
          <table:table-cell table:formula="of:=CONCATENATE([$JSON.$A$1];[.$C150];[$JSON.$B$1];[.$E150];[$JSON.$C$1];[.$F150];[$JSON.$D$1];IF(ISNA([.$S150]);&quot;null&quot;;&quot;&quot;&quot;&quot;&amp;[.$S150]&amp;&quot;&quot;&quot;&quot;);[$JSON.$E$1];[.$U150];[$JSON.$F$1];IF(ISNA([.$V150]);&quot;null&quot;;&quot;&quot;&quot;&quot;&amp;[.$V150]&amp;&quot;&quot;&quot;&quot;);[$JSON.$G$1];[.$X150];[$JSON.$H$1];[.$H150];[$JSON.$I$1];[.J150];[$JSON.$J$1];[.$L150];[$JSON.$K$1];[.$O150];[$JSON.$L$1];[.$N150];[$JSON.$M$1];[.$R150];[$JSON.$N$1];[.$T150];[$JSON.$O$1];[.$W150];[$JSON.$P$1];[.$A150];[$JSON.$Q$1];[.$B150];[$JSON.$R$1])" office:value-type="string" office:string-value="{&quot;id&quot;:&quot;2-17&quot;,&quot;name&quot;:&quot;ジャン＝ジャック・ルソー&quot;,&quot;kana&quot;:&quot;じゃんじゃっくるそー&quot;,&quot;traitText&quot;:&quot;思想&quot;,&quot;ruleText&quot;:&quot;戦場に置かれたとき、自分の手札1枚を墓地に置いて、戦場で最も高いパワーを持つイジン1体を破壊する。&quot;,&quot;legacyText&quot;:&quot;1ドローする&quot;,&quot;imageUrl&quot;:&quot;https://one-draw.jp/ijinden/cardlist/002/card/02_017.png&quot;,&quot;expansion&quot;:25,&quot;rarity&quot;:1,&quot;type&quot;:1,&quot;level&quot;:3,&quot;color&quot;:2,&quot;term&quot;:0,&quot;trait&quot;:8,&quot;legacy&quot;:4,&quot;orderTable&quot;:149,&quot;orderDeck&quot;:80}," calcext:value-type="string">
            <text:p>{"id":"2-17","name":"ジャン＝ジャック・ルソー","kana":"じゃんじゃっくるそー","traitText":"思想","ruleText":"戦場に置かれたとき、自分の手札1枚を墓地に置いて、戦場で最も高いパワーを持つイジン1体を破壊する。","legacyText":"1ドローする","imageUrl":"https://one-draw.jp/ijinden/cardlist/002/card/02_017.png","expansion":25,"rarity":1,"type":1,"level":3,"color":2,"term":0,"trait":8,"legacy":4,"orderTable":149,"orderDeck":80},</text:p>
          </table:table-cell>
          <table:table-cell table:number-columns-repeated="16347"/>
        </table:table-row>
        <table:table-row table:style-name="ro2">
          <table:table-cell office:value-type="float" office:value="150" calcext:value-type="float">
            <text:p>150</text:p>
          </table:table-cell>
          <table:table-cell office:value-type="float" office:value="38" calcext:value-type="float">
            <text:p>38</text:p>
          </table:table-cell>
          <table:table-cell office:value-type="string" calcext:value-type="string">
            <text:p>2-18</text:p>
          </table:table-cell>
          <table:table-cell office:value-type="float" office:value="18" calcext:value-type="float">
            <text:p>18</text:p>
          </table:table-cell>
          <table:table-cell office:value-type="string" calcext:value-type="string">
            <text:p>エカチェリーナ2世</text:p>
          </table:table-cell>
          <table:table-cell office:value-type="string" calcext:value-type="string">
            <text:p>えかちぇりーなにせい</text:p>
          </table:table-cell>
          <table:table-cell office:value-type="string" calcext:value-type="string">
            <text:p>第２弾ブースターパック</text:p>
          </table:table-cell>
          <table:table-cell table:formula="of:=VLOOKUP([.G151];[$収録番号.$A$1:$収録番号.$B$9];2;0)" office:value-type="float" office:value="25" calcext:value-type="float">
            <text:p>25</text:p>
          </table:table-cell>
          <table:table-cell office:value-type="string" calcext:value-type="string">
            <text:p>R</text:p>
          </table:table-cell>
          <table:table-cell table:formula="of:=VLOOKUP([.I151];[$レアリティ番号.$A$1:$レアリティ番号.$B$4];2;0)" office:value-type="float" office:value="2" calcext:value-type="float">
            <text:p>2</text:p>
          </table:table-cell>
          <table:table-cell office:value-type="string" calcext:value-type="string">
            <text:p>イジン</text:p>
          </table:table-cell>
          <table:table-cell table:formula="of:=VLOOKUP([.K151];[$種類番号.$A$1:$種類番号.$B$4];2;0)" office:value-type="float" office:value="1" calcext:value-type="float">
            <text:p>1</text:p>
          </table:table-cell>
          <table:table-cell office:value-type="string" calcext:value-type="string">
            <text:p>青</text:p>
          </table:table-cell>
          <table:table-cell table:formula="of:=VLOOKUP([.M151];[$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51];[$特性番号.$A$1:$特性番号.$B$8];2;0);0)" office:value-type="float" office:value="0" calcext:value-type="float">
            <text:p>0</text:p>
          </table:table-cell>
          <table:table-cell office:value-type="string" calcext:value-type="string">
            <text:p>マリョクが相手の魔力ゾーンに3つ以上ある間、相手は表向きでマリョク配置できない。¶相手の魔力ゾーンにあるマリョク1つにつき「パワー+1000」を得る。</text:p>
          </table:table-cell>
          <table:table-cell table:style-name="ce8" office:value-type="string" calcext:value-type="string">
            <text:p>1ドローする</text:p>
          </table:table-cell>
          <table:table-cell table:formula="of:=IFERROR(VLOOKUP([.$V151];[$遺業能力番号.$A$1:$遺業能力番号.$B$9];2;0);0)" office:value-type="float" office:value="4" calcext:value-type="float">
            <text:p>4</text:p>
          </table:table-cell>
          <table:table-cell office:value-type="string" calcext:value-type="string">
            <text:p>https://one-draw.jp/ijinden/cardlist/002/card/02_018.png</text:p>
          </table:table-cell>
          <table:table-cell table:formula="of:=CONCATENATE([$JSON.$A$1];[.$C151];[$JSON.$B$1];[.$E151];[$JSON.$C$1];[.$F151];[$JSON.$D$1];IF(ISNA([.$S151]);&quot;null&quot;;&quot;&quot;&quot;&quot;&amp;[.$S151]&amp;&quot;&quot;&quot;&quot;);[$JSON.$E$1];[.$U151];[$JSON.$F$1];IF(ISNA([.$V151]);&quot;null&quot;;&quot;&quot;&quot;&quot;&amp;[.$V151]&amp;&quot;&quot;&quot;&quot;);[$JSON.$G$1];[.$X151];[$JSON.$H$1];[.$H151];[$JSON.$I$1];[.J151];[$JSON.$J$1];[.$L151];[$JSON.$K$1];[.$O151];[$JSON.$L$1];[.$N151];[$JSON.$M$1];[.$R151];[$JSON.$N$1];[.$T151];[$JSON.$O$1];[.$W151];[$JSON.$P$1];[.$A151];[$JSON.$Q$1];[.$B151];[$JSON.$R$1])" office:value-type="string" office:string-value="{&quot;id&quot;:&quot;2-18&quot;,&quot;name&quot;:&quot;エカチェリーナ2世&quot;,&quot;kana&quot;:&quot;えかちぇりーなにせい&quot;,&quot;traitText&quot;:null,&quot;ruleText&quot;:&quot;マリョクが相手の魔力ゾーンに3つ以上ある間、相手は表向きでマリョク配置できない。¶相手の魔力ゾーンにあるマリョク1つにつき「パワー+1000」を得る。&quot;,&quot;legacyText&quot;:&quot;1ドローする&quot;,&quot;imageUrl&quot;:&quot;https://one-draw.jp/ijinden/cardlist/002/card/02_018.png&quot;,&quot;expansion&quot;:25,&quot;rarity&quot;:2,&quot;type&quot;:1,&quot;level&quot;:2,&quot;color&quot;:2,&quot;term&quot;:0,&quot;trait&quot;:0,&quot;legacy&quot;:4,&quot;orderTable&quot;:150,&quot;orderDeck&quot;:38}," calcext:value-type="string">
            <text:p>{"id":"2-18","name":"エカチェリーナ2世","kana":"えかちぇりーなにせい","traitText":null,"ruleText":"マリョクが相手の魔力ゾーンに3つ以上ある間、相手は表向きでマリョク配置できない。¶相手の魔力ゾーンにあるマリョク1つにつき「パワー+1000」を得る。","legacyText":"1ドローする","imageUrl":"https://one-draw.jp/ijinden/cardlist/002/card/02_018.png","expansion":25,"rarity":2,"type":1,"level":2,"color":2,"term":0,"trait":0,"legacy":4,"orderTable":150,"orderDeck":38},</text:p>
          </table:table-cell>
          <table:table-cell table:number-columns-repeated="16347"/>
        </table:table-row>
        <table:table-row table:style-name="ro2">
          <table:table-cell office:value-type="float" office:value="151" calcext:value-type="float">
            <text:p>151</text:p>
          </table:table-cell>
          <table:table-cell office:value-type="float" office:value="8" calcext:value-type="float">
            <text:p>8</text:p>
          </table:table-cell>
          <table:table-cell office:value-type="string" calcext:value-type="string">
            <text:p>2-19</text:p>
          </table:table-cell>
          <table:table-cell office:value-type="float" office:value="19" calcext:value-type="float">
            <text:p>19</text:p>
          </table:table-cell>
          <table:table-cell office:value-type="string" calcext:value-type="string">
            <text:p>ジョン・ロック</text:p>
          </table:table-cell>
          <table:table-cell office:value-type="string" calcext:value-type="string">
            <text:p>じょんろっく</text:p>
          </table:table-cell>
          <table:table-cell office:value-type="string" calcext:value-type="string">
            <text:p>第２弾ブースターパック</text:p>
          </table:table-cell>
          <table:table-cell table:formula="of:=VLOOKUP([.G152];[$収録番号.$A$1:$収録番号.$B$9];2;0)" office:value-type="float" office:value="25" calcext:value-type="float">
            <text:p>25</text:p>
          </table:table-cell>
          <table:table-cell office:value-type="string" calcext:value-type="string">
            <text:p>N</text:p>
          </table:table-cell>
          <table:table-cell table:formula="of:=VLOOKUP([.I152];[$レアリティ番号.$A$1:$レアリティ番号.$B$4];2;0)" office:value-type="float" office:value="1" calcext:value-type="float">
            <text:p>1</text:p>
          </table:table-cell>
          <table:table-cell office:value-type="string" calcext:value-type="string">
            <text:p>イジン</text:p>
          </table:table-cell>
          <table:table-cell table:formula="of:=VLOOKUP([.K152];[$種類番号.$A$1:$種類番号.$B$4];2;0)" office:value-type="float" office:value="1" calcext:value-type="float">
            <text:p>1</text:p>
          </table:table-cell>
          <table:table-cell office:value-type="string" calcext:value-type="string">
            <text:p>青</text:p>
          </table:table-cell>
          <table:table-cell table:formula="of:=VLOOKUP([.M152];[$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2];[$能力語番号.$A$1:$能力語番号.$B$10];2;0);0)" office:value-type="float" office:value="0" calcext:value-type="float">
            <text:p>0</text:p>
          </table:table-cell>
          <table:table-cell office:value-type="string" calcext:value-type="string">
            <text:p>思想</text:p>
          </table:table-cell>
          <table:table-cell table:formula="of:=IFERROR(VLOOKUP([.$S152];[$特性番号.$A$1:$特性番号.$B$8];2;0);0)" office:value-type="float" office:value="8" calcext:value-type="float">
            <text:p>8</text:p>
          </table:table-cell>
          <table:table-cell office:value-type="string" calcext:value-type="string">
            <text:p>自分の戦場のガーディアンが破壊されるたびに発動できる。アタッカー1体を手札に戻す。</text:p>
          </table:table-cell>
          <table:table-cell table:style-name="ce8" office:value-type="string" calcext:value-type="string">
            <text:p>1ドローする</text:p>
          </table:table-cell>
          <table:table-cell table:formula="of:=IFERROR(VLOOKUP([.$V152];[$遺業能力番号.$A$1:$遺業能力番号.$B$9];2;0);0)" office:value-type="float" office:value="4" calcext:value-type="float">
            <text:p>4</text:p>
          </table:table-cell>
          <table:table-cell office:value-type="string" calcext:value-type="string">
            <text:p>https://one-draw.jp/ijinden/cardlist/002/card/02_019.png</text:p>
          </table:table-cell>
          <table:table-cell table:formula="of:=CONCATENATE([$JSON.$A$1];[.$C152];[$JSON.$B$1];[.$E152];[$JSON.$C$1];[.$F152];[$JSON.$D$1];IF(ISNA([.$S152]);&quot;null&quot;;&quot;&quot;&quot;&quot;&amp;[.$S152]&amp;&quot;&quot;&quot;&quot;);[$JSON.$E$1];[.$U152];[$JSON.$F$1];IF(ISNA([.$V152]);&quot;null&quot;;&quot;&quot;&quot;&quot;&amp;[.$V152]&amp;&quot;&quot;&quot;&quot;);[$JSON.$G$1];[.$X152];[$JSON.$H$1];[.$H152];[$JSON.$I$1];[.J152];[$JSON.$J$1];[.$L152];[$JSON.$K$1];[.$O152];[$JSON.$L$1];[.$N152];[$JSON.$M$1];[.$R152];[$JSON.$N$1];[.$T152];[$JSON.$O$1];[.$W152];[$JSON.$P$1];[.$A152];[$JSON.$Q$1];[.$B152];[$JSON.$R$1])" office:value-type="string" office:string-value="{&quot;id&quot;:&quot;2-19&quot;,&quot;name&quot;:&quot;ジョン・ロック&quot;,&quot;kana&quot;:&quot;じょんろっく&quot;,&quot;traitText&quot;:&quot;思想&quot;,&quot;ruleText&quot;:&quot;自分の戦場のガーディアンが破壊されるたびに発動できる。アタッカー1体を手札に戻す。&quot;,&quot;legacyText&quot;:&quot;1ドローする&quot;,&quot;imageUrl&quot;:&quot;https://one-draw.jp/ijinden/cardlist/002/card/02_019.png&quot;,&quot;expansion&quot;:25,&quot;rarity&quot;:1,&quot;type&quot;:1,&quot;level&quot;:1,&quot;color&quot;:2,&quot;term&quot;:0,&quot;trait&quot;:8,&quot;legacy&quot;:4,&quot;orderTable&quot;:151,&quot;orderDeck&quot;:8}," calcext:value-type="string">
            <text:p>{"id":"2-19","name":"ジョン・ロック","kana":"じょんろっく","traitText":"思想","ruleText":"自分の戦場のガーディアンが破壊されるたびに発動できる。アタッカー1体を手札に戻す。","legacyText":"1ドローする","imageUrl":"https://one-draw.jp/ijinden/cardlist/002/card/02_019.png","expansion":25,"rarity":1,"type":1,"level":1,"color":2,"term":0,"trait":8,"legacy":4,"orderTable":151,"orderDeck":8},</text:p>
          </table:table-cell>
          <table:table-cell table:number-columns-repeated="16347"/>
        </table:table-row>
        <table:table-row table:style-name="ro2">
          <table:table-cell office:value-type="float" office:value="152" calcext:value-type="float">
            <text:p>152</text:p>
          </table:table-cell>
          <table:table-cell office:value-type="float" office:value="39" calcext:value-type="float">
            <text:p>39</text:p>
          </table:table-cell>
          <table:table-cell office:value-type="string" calcext:value-type="string">
            <text:p>2-20</text:p>
          </table:table-cell>
          <table:table-cell office:value-type="float" office:value="20" calcext:value-type="float">
            <text:p>20</text:p>
          </table:table-cell>
          <table:table-cell office:value-type="string" calcext:value-type="string">
            <text:p>洪秀全</text:p>
          </table:table-cell>
          <table:table-cell office:value-type="string" calcext:value-type="string">
            <text:p>こうしゅうぜん</text:p>
          </table:table-cell>
          <table:table-cell office:value-type="string" calcext:value-type="string">
            <text:p>第２弾ブースターパック</text:p>
          </table:table-cell>
          <table:table-cell table:formula="of:=VLOOKUP([.G153];[$収録番号.$A$1:$収録番号.$B$9];2;0)" office:value-type="float" office:value="25" calcext:value-type="float">
            <text:p>25</text:p>
          </table:table-cell>
          <table:table-cell office:value-type="string" calcext:value-type="string">
            <text:p>N</text:p>
          </table:table-cell>
          <table:table-cell table:formula="of:=VLOOKUP([.I153];[$レアリティ番号.$A$1:$レアリティ番号.$B$4];2;0)" office:value-type="float" office:value="1" calcext:value-type="float">
            <text:p>1</text:p>
          </table:table-cell>
          <table:table-cell office:value-type="string" calcext:value-type="string">
            <text:p>イジン</text:p>
          </table:table-cell>
          <table:table-cell table:formula="of:=VLOOKUP([.K153];[$種類番号.$A$1:$種類番号.$B$4];2;0)" office:value-type="float" office:value="1" calcext:value-type="float">
            <text:p>1</text:p>
          </table:table-cell>
          <table:table-cell office:value-type="string" calcext:value-type="string">
            <text:p>青</text:p>
          </table:table-cell>
          <table:table-cell table:formula="of:=VLOOKUP([.M153];[$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徴募</text:p>
          </table:table-cell>
          <table:table-cell table:formula="of:=IFERROR(VLOOKUP([.$Q153];[$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S153];[$特性番号.$A$1:$特性番号.$B$8];2;0);0)" office:value-type="float" office:value="0" calcext:value-type="float">
            <text:p>0</text:p>
          </table:table-cell>
          <table:table-cell office:value-type="string" calcext:value-type="string">
            <text:p>徴募 - この能力は墓地でも発動する。自分のエンドフェイズが開始したとき、このターンにアタッカーが破壊されているなら発動できる。相手の手札を見てマホウかハイケイ1つを墓地に置く。¶ブロック+2000</text:p>
          </table:table-cell>
          <table:table-cell table:style-name="ce8" office:value-type="string" calcext:value-type="string">
            <text:p>1ドローする</text:p>
          </table:table-cell>
          <table:table-cell table:formula="of:=IFERROR(VLOOKUP([.$V153];[$遺業能力番号.$A$1:$遺業能力番号.$B$9];2;0);0)" office:value-type="float" office:value="4" calcext:value-type="float">
            <text:p>4</text:p>
          </table:table-cell>
          <table:table-cell office:value-type="string" calcext:value-type="string">
            <text:p>https://one-draw.jp/ijinden/cardlist/002/card/02_020.png</text:p>
          </table:table-cell>
          <table:table-cell table:formula="of:=CONCATENATE([$JSON.$A$1];[.$C153];[$JSON.$B$1];[.$E153];[$JSON.$C$1];[.$F153];[$JSON.$D$1];IF(ISNA([.$S153]);&quot;null&quot;;&quot;&quot;&quot;&quot;&amp;[.$S153]&amp;&quot;&quot;&quot;&quot;);[$JSON.$E$1];[.$U153];[$JSON.$F$1];IF(ISNA([.$V153]);&quot;null&quot;;&quot;&quot;&quot;&quot;&amp;[.$V153]&amp;&quot;&quot;&quot;&quot;);[$JSON.$G$1];[.$X153];[$JSON.$H$1];[.$H153];[$JSON.$I$1];[.J153];[$JSON.$J$1];[.$L153];[$JSON.$K$1];[.$O153];[$JSON.$L$1];[.$N153];[$JSON.$M$1];[.$R153];[$JSON.$N$1];[.$T153];[$JSON.$O$1];[.$W153];[$JSON.$P$1];[.$A153];[$JSON.$Q$1];[.$B153];[$JSON.$R$1])" office:value-type="string" office:string-value="{&quot;id&quot;:&quot;2-20&quot;,&quot;name&quot;:&quot;洪秀全&quot;,&quot;kana&quot;:&quot;こうしゅうぜん&quot;,&quot;traitText&quot;:null,&quot;ruleText&quot;:&quot;徴募 - この能力は墓地でも発動する。自分のエンドフェイズが開始したとき、このターンにアタッカーが破壊されているなら発動できる。相手の手札を見てマホウかハイケイ1つを墓地に置く。¶ブロック+2000&quot;,&quot;legacyText&quot;:&quot;1ドローする&quot;,&quot;imageUrl&quot;:&quot;https://one-draw.jp/ijinden/cardlist/002/card/02_020.png&quot;,&quot;expansion&quot;:25,&quot;rarity&quot;:1,&quot;type&quot;:1,&quot;level&quot;:2,&quot;color&quot;:2,&quot;term&quot;:8,&quot;trait&quot;:0,&quot;legacy&quot;:4,&quot;orderTable&quot;:152,&quot;orderDeck&quot;:39}," calcext:value-type="string">
            <text:p>{"id":"2-20","name":"洪秀全","kana":"こうしゅうぜん","traitText":null,"ruleText":"徴募 - この能力は墓地でも発動する。自分のエンドフェイズが開始したとき、このターンにアタッカーが破壊されているなら発動できる。相手の手札を見てマホウかハイケイ1つを墓地に置く。¶ブロック+2000","legacyText":"1ドローする","imageUrl":"https://one-draw.jp/ijinden/cardlist/002/card/02_020.png","expansion":25,"rarity":1,"type":1,"level":2,"color":2,"term":8,"trait":0,"legacy":4,"orderTable":152,"orderDeck":39},</text:p>
          </table:table-cell>
          <table:table-cell table:number-columns-repeated="16347"/>
        </table:table-row>
        <table:table-row table:style-name="ro2">
          <table:table-cell office:value-type="float" office:value="153" calcext:value-type="float">
            <text:p>153</text:p>
          </table:table-cell>
          <table:table-cell office:value-type="float" office:value="81" calcext:value-type="float">
            <text:p>81</text:p>
          </table:table-cell>
          <table:table-cell office:value-type="string" calcext:value-type="string">
            <text:p>2-21</text:p>
          </table:table-cell>
          <table:table-cell office:value-type="float" office:value="21" calcext:value-type="float">
            <text:p>21</text:p>
          </table:table-cell>
          <table:table-cell office:value-type="string" calcext:value-type="string">
            <text:p>ジェームズ＝ワット</text:p>
          </table:table-cell>
          <table:table-cell office:value-type="string" calcext:value-type="string">
            <text:p>じぇーむずわっと</text:p>
          </table:table-cell>
          <table:table-cell office:value-type="string" calcext:value-type="string">
            <text:p>第２弾ブースターパック</text:p>
          </table:table-cell>
          <table:table-cell table:formula="of:=VLOOKUP([.G154];[$収録番号.$A$1:$収録番号.$B$9];2;0)" office:value-type="float" office:value="25" calcext:value-type="float">
            <text:p>25</text:p>
          </table:table-cell>
          <table:table-cell office:value-type="string" calcext:value-type="string">
            <text:p>R</text:p>
          </table:table-cell>
          <table:table-cell table:formula="of:=VLOOKUP([.I154];[$レアリティ番号.$A$1:$レアリティ番号.$B$4];2;0)" office:value-type="float" office:value="2" calcext:value-type="float">
            <text:p>2</text:p>
          </table:table-cell>
          <table:table-cell office:value-type="string" calcext:value-type="string">
            <text:p>イジン</text:p>
          </table:table-cell>
          <table:table-cell table:formula="of:=VLOOKUP([.K154];[$種類番号.$A$1:$種類番号.$B$4];2;0)" office:value-type="float" office:value="1" calcext:value-type="float">
            <text:p>1</text:p>
          </table:table-cell>
          <table:table-cell office:value-type="string" calcext:value-type="string">
            <text:p>青</text:p>
          </table:table-cell>
          <table:table-cell table:formula="of:=VLOOKUP([.M154];[$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54];[$特性番号.$A$1:$特性番号.$B$8];2;0);0)" office:value-type="float" office:value="0" calcext:value-type="float">
            <text:p>0</text:p>
          </table:table-cell>
          <table:table-cell office:value-type="string" calcext:value-type="string">
            <text:p>自分のメインフェイズが開始したとき、自分の魔力ゾーンの『ストーン』マリョクが1つだけならマリョク配置権+1する。ちょうど2つならイジン召喚権+1する。3つ以上なら1ドローする。</text:p>
          </table:table-cell>
          <table:table-cell table:style-name="ce8" office:value-type="string" calcext:value-type="string">
            <text:p>反魂</text:p>
          </table:table-cell>
          <table:table-cell table:formula="of:=IFERROR(VLOOKUP([.$V154];[$遺業能力番号.$A$1:$遺業能力番号.$B$9];2;0);0)" office:value-type="float" office:value="6" calcext:value-type="float">
            <text:p>6</text:p>
          </table:table-cell>
          <table:table-cell office:value-type="string" calcext:value-type="string">
            <text:p>https://one-draw.jp/ijinden/cardlist/002/card/02_021.png</text:p>
          </table:table-cell>
          <table:table-cell table:formula="of:=CONCATENATE([$JSON.$A$1];[.$C154];[$JSON.$B$1];[.$E154];[$JSON.$C$1];[.$F154];[$JSON.$D$1];IF(ISNA([.$S154]);&quot;null&quot;;&quot;&quot;&quot;&quot;&amp;[.$S154]&amp;&quot;&quot;&quot;&quot;);[$JSON.$E$1];[.$U154];[$JSON.$F$1];IF(ISNA([.$V154]);&quot;null&quot;;&quot;&quot;&quot;&quot;&amp;[.$V154]&amp;&quot;&quot;&quot;&quot;);[$JSON.$G$1];[.$X154];[$JSON.$H$1];[.$H154];[$JSON.$I$1];[.J154];[$JSON.$J$1];[.$L154];[$JSON.$K$1];[.$O154];[$JSON.$L$1];[.$N154];[$JSON.$M$1];[.$R154];[$JSON.$N$1];[.$T154];[$JSON.$O$1];[.$W154];[$JSON.$P$1];[.$A154];[$JSON.$Q$1];[.$B154];[$JSON.$R$1])" office:value-type="string" office:string-value="{&quot;id&quot;:&quot;2-21&quot;,&quot;name&quot;:&quot;ジェームズ＝ワット&quot;,&quot;kana&quot;:&quot;じぇーむずわっと&quot;,&quot;traitText&quot;:null,&quot;ruleText&quot;:&quot;自分のメインフェイズが開始したとき、自分の魔力ゾーンの『ストーン』マリョクが1つだけならマリョク配置権+1する。ちょうど2つならイジン召喚権+1する。3つ以上なら1ドローする。&quot;,&quot;legacyText&quot;:&quot;反魂&quot;,&quot;imageUrl&quot;:&quot;https://one-draw.jp/ijinden/cardlist/002/card/02_021.png&quot;,&quot;expansion&quot;:25,&quot;rarity&quot;:2,&quot;type&quot;:1,&quot;level&quot;:3,&quot;color&quot;:2,&quot;term&quot;:0,&quot;trait&quot;:0,&quot;legacy&quot;:6,&quot;orderTable&quot;:153,&quot;orderDeck&quot;:81}," calcext:value-type="string">
            <text:p>{"id":"2-21","name":"ジェームズ＝ワット","kana":"じぇーむずわっと","traitText":null,"ruleText":"自分のメインフェイズが開始したとき、自分の魔力ゾーンの『ストーン』マリョクが1つだけならマリョク配置権+1する。ちょうど2つならイジン召喚権+1する。3つ以上なら1ドローする。","legacyText":"反魂","imageUrl":"https://one-draw.jp/ijinden/cardlist/002/card/02_021.png","expansion":25,"rarity":2,"type":1,"level":3,"color":2,"term":0,"trait":0,"legacy":6,"orderTable":153,"orderDeck":81},</text:p>
          </table:table-cell>
          <table:table-cell table:number-columns-repeated="16347"/>
        </table:table-row>
        <table:table-row table:style-name="ro2">
          <table:table-cell office:value-type="float" office:value="154" calcext:value-type="float">
            <text:p>154</text:p>
          </table:table-cell>
          <table:table-cell office:value-type="float" office:value="120" calcext:value-type="float">
            <text:p>120</text:p>
          </table:table-cell>
          <table:table-cell office:value-type="string" calcext:value-type="string">
            <text:p>2-22</text:p>
          </table:table-cell>
          <table:table-cell office:value-type="float" office:value="22" calcext:value-type="float">
            <text:p>22</text:p>
          </table:table-cell>
          <table:table-cell office:value-type="string" calcext:value-type="string">
            <text:p>日蓮</text:p>
          </table:table-cell>
          <table:table-cell office:value-type="string" calcext:value-type="string">
            <text:p>にちれん</text:p>
          </table:table-cell>
          <table:table-cell office:value-type="string" calcext:value-type="string">
            <text:p>第２弾ブースターパック</text:p>
          </table:table-cell>
          <table:table-cell table:formula="of:=VLOOKUP([.G155];[$収録番号.$A$1:$収録番号.$B$9];2;0)" office:value-type="float" office:value="25" calcext:value-type="float">
            <text:p>25</text:p>
          </table:table-cell>
          <table:table-cell office:value-type="string" calcext:value-type="string">
            <text:p>N</text:p>
          </table:table-cell>
          <table:table-cell table:formula="of:=VLOOKUP([.I155];[$レアリティ番号.$A$1:$レアリティ番号.$B$4];2;0)" office:value-type="float" office:value="1" calcext:value-type="float">
            <text:p>1</text:p>
          </table:table-cell>
          <table:table-cell office:value-type="string" calcext:value-type="string">
            <text:p>イジン</text:p>
          </table:table-cell>
          <table:table-cell table:formula="of:=VLOOKUP([.K155];[$種類番号.$A$1:$種類番号.$B$4];2;0)" office:value-type="float" office:value="1" calcext:value-type="float">
            <text:p>1</text:p>
          </table:table-cell>
          <table:table-cell office:value-type="string" calcext:value-type="string">
            <text:p>青</text:p>
          </table:table-cell>
          <table:table-cell table:formula="of:=VLOOKUP([.M155];[$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航海</text:p>
          </table:table-cell>
          <table:table-cell table:formula="of:=IFERROR(VLOOKUP([.$Q155];[$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155];[$特性番号.$A$1:$特性番号.$B$8];2;0);0)" office:value-type="float" office:value="0" calcext:value-type="float">
            <text:p>0</text:p>
          </table:table-cell>
          <table:table-cell office:value-type="string" calcext:value-type="string">
            <text:p>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text:p>
          </table:table-cell>
          <table:table-cell table:style-name="ce8" table:formula="of:=NA()" office:value-type="string" office:string-value="" calcext:value-type="error">
            <text:p>#N/A</text:p>
          </table:table-cell>
          <table:table-cell table:formula="of:=IFERROR(VLOOKUP([.$V155];[$遺業能力番号.$A$1:$遺業能力番号.$B$9];2;0);0)" office:value-type="float" office:value="0" calcext:value-type="float">
            <text:p>0</text:p>
          </table:table-cell>
          <table:table-cell office:value-type="string" calcext:value-type="string">
            <text:p>https://one-draw.jp/ijinden/cardlist/002/card/02_022.png</text:p>
          </table:table-cell>
          <table:table-cell table:formula="of:=CONCATENATE([$JSON.$A$1];[.$C155];[$JSON.$B$1];[.$E155];[$JSON.$C$1];[.$F155];[$JSON.$D$1];IF(ISNA([.$S155]);&quot;null&quot;;&quot;&quot;&quot;&quot;&amp;[.$S155]&amp;&quot;&quot;&quot;&quot;);[$JSON.$E$1];[.$U155];[$JSON.$F$1];IF(ISNA([.$V155]);&quot;null&quot;;&quot;&quot;&quot;&quot;&amp;[.$V155]&amp;&quot;&quot;&quot;&quot;);[$JSON.$G$1];[.$X155];[$JSON.$H$1];[.$H155];[$JSON.$I$1];[.J155];[$JSON.$J$1];[.$L155];[$JSON.$K$1];[.$O155];[$JSON.$L$1];[.$N155];[$JSON.$M$1];[.$R155];[$JSON.$N$1];[.$T155];[$JSON.$O$1];[.$W155];[$JSON.$P$1];[.$A155];[$JSON.$Q$1];[.$B155];[$JSON.$R$1])" office:value-type="string" office:string-value="{&quot;id&quot;:&quot;2-22&quot;,&quot;name&quot;:&quot;日蓮&quot;,&quot;kana&quot;:&quot;にちれん&quot;,&quot;traitText&quot;:null,&quot;ruleText&quot;:&quot;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quot;,&quot;legacyText&quot;:null,&quot;imageUrl&quot;:&quot;https://one-draw.jp/ijinden/cardlist/002/card/02_022.png&quot;,&quot;expansion&quot;:25,&quot;rarity&quot;:1,&quot;type&quot;:1,&quot;level&quot;:4,&quot;color&quot;:2,&quot;term&quot;:1,&quot;trait&quot;:0,&quot;legacy&quot;:0,&quot;orderTable&quot;:154,&quot;orderDeck&quot;:120}," calcext:value-type="string">
            <text:p>{"id":"2-22","name":"日蓮","kana":"にちれん","traitText":null,"ruleText":"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legacyText":null,"imageUrl":"https://one-draw.jp/ijinden/cardlist/002/card/02_022.png","expansion":25,"rarity":1,"type":1,"level":4,"color":2,"term":1,"trait":0,"legacy":0,"orderTable":154,"orderDeck":120},</text:p>
          </table:table-cell>
          <table:table-cell table:number-columns-repeated="16347"/>
        </table:table-row>
        <table:table-row table:style-name="ro2">
          <table:table-cell office:value-type="float" office:value="155" calcext:value-type="float">
            <text:p>155</text:p>
          </table:table-cell>
          <table:table-cell office:value-type="float" office:value="205" calcext:value-type="float">
            <text:p>205</text:p>
          </table:table-cell>
          <table:table-cell office:value-type="string" calcext:value-type="string">
            <text:p>2-23</text:p>
          </table:table-cell>
          <table:table-cell office:value-type="float" office:value="23" calcext:value-type="float">
            <text:p>23</text:p>
          </table:table-cell>
          <table:table-cell office:value-type="string" calcext:value-type="string">
            <text:p>李舜臣</text:p>
          </table:table-cell>
          <table:table-cell office:value-type="string" calcext:value-type="string">
            <text:p>りしゅんしん</text:p>
          </table:table-cell>
          <table:table-cell office:value-type="string" calcext:value-type="string">
            <text:p>第２弾ブースターパック</text:p>
          </table:table-cell>
          <table:table-cell table:formula="of:=VLOOKUP([.G156];[$収録番号.$A$1:$収録番号.$B$9];2;0)" office:value-type="float" office:value="25" calcext:value-type="float">
            <text:p>25</text:p>
          </table:table-cell>
          <table:table-cell office:value-type="string" calcext:value-type="string">
            <text:p>N</text:p>
          </table:table-cell>
          <table:table-cell table:formula="of:=VLOOKUP([.I156];[$レアリティ番号.$A$1:$レアリティ番号.$B$4];2;0)" office:value-type="float" office:value="1" calcext:value-type="float">
            <text:p>1</text:p>
          </table:table-cell>
          <table:table-cell office:value-type="string" calcext:value-type="string">
            <text:p>イジン</text:p>
          </table:table-cell>
          <table:table-cell table:formula="of:=VLOOKUP([.K156];[$種類番号.$A$1:$種類番号.$B$4];2;0)" office:value-type="float" office:value="1" calcext:value-type="float">
            <text:p>1</text:p>
          </table:table-cell>
          <table:table-cell office:value-type="string" calcext:value-type="string">
            <text:p>青</text:p>
          </table:table-cell>
          <table:table-cell table:formula="of:=VLOOKUP([.M156];[$色番号.$A$1:$色番号.$B$10];2;0)" office:value-type="float" office:value="2" calcext:value-type="float">
            <text:p>2</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56];[$特性番号.$A$1:$特性番号.$B$8];2;0);0)" office:value-type="float" office:value="0" calcext:value-type="float">
            <text:p>0</text:p>
          </table:table-cell>
          <table:table-cell office:value-type="string" calcext:value-type="string">
            <text:p>ウォッチャー¶「即応」を持つイジンが相手の戦場にいる間「ブロック+4000」を得る。</text:p>
          </table:table-cell>
          <table:table-cell table:style-name="ce8" table:formula="of:=NA()" office:value-type="string" office:string-value="" calcext:value-type="error">
            <text:p>#N/A</text:p>
          </table:table-cell>
          <table:table-cell table:formula="of:=IFERROR(VLOOKUP([.$V156];[$遺業能力番号.$A$1:$遺業能力番号.$B$9];2;0);0)" office:value-type="float" office:value="0" calcext:value-type="float">
            <text:p>0</text:p>
          </table:table-cell>
          <table:table-cell office:value-type="string" calcext:value-type="string">
            <text:p>https://one-draw.jp/ijinden/cardlist/002/card/02_023.png</text:p>
          </table:table-cell>
          <table:table-cell table:formula="of:=CONCATENATE([$JSON.$A$1];[.$C156];[$JSON.$B$1];[.$E156];[$JSON.$C$1];[.$F156];[$JSON.$D$1];IF(ISNA([.$S156]);&quot;null&quot;;&quot;&quot;&quot;&quot;&amp;[.$S156]&amp;&quot;&quot;&quot;&quot;);[$JSON.$E$1];[.$U156];[$JSON.$F$1];IF(ISNA([.$V156]);&quot;null&quot;;&quot;&quot;&quot;&quot;&amp;[.$V156]&amp;&quot;&quot;&quot;&quot;);[$JSON.$G$1];[.$X156];[$JSON.$H$1];[.$H156];[$JSON.$I$1];[.J156];[$JSON.$J$1];[.$L156];[$JSON.$K$1];[.$O156];[$JSON.$L$1];[.$N156];[$JSON.$M$1];[.$R156];[$JSON.$N$1];[.$T156];[$JSON.$O$1];[.$W156];[$JSON.$P$1];[.$A156];[$JSON.$Q$1];[.$B156];[$JSON.$R$1])" office:value-type="string" office:string-value="{&quot;id&quot;:&quot;2-23&quot;,&quot;name&quot;:&quot;李舜臣&quot;,&quot;kana&quot;:&quot;りしゅんしん&quot;,&quot;traitText&quot;:null,&quot;ruleText&quot;:&quot;ウォッチャー¶「即応」を持つイジンが相手の戦場にいる間「ブロック+4000」を得る。&quot;,&quot;legacyText&quot;:null,&quot;imageUrl&quot;:&quot;https://one-draw.jp/ijinden/cardlist/002/card/02_023.png&quot;,&quot;expansion&quot;:25,&quot;rarity&quot;:1,&quot;type&quot;:1,&quot;level&quot;:7,&quot;color&quot;:2,&quot;term&quot;:0,&quot;trait&quot;:0,&quot;legacy&quot;:0,&quot;orderTable&quot;:155,&quot;orderDeck&quot;:205}," calcext:value-type="string">
            <text:p>{"id":"2-23","name":"李舜臣","kana":"りしゅんしん","traitText":null,"ruleText":"ウォッチャー¶「即応」を持つイジンが相手の戦場にいる間「ブロック+4000」を得る。","legacyText":null,"imageUrl":"https://one-draw.jp/ijinden/cardlist/002/card/02_023.png","expansion":25,"rarity":1,"type":1,"level":7,"color":2,"term":0,"trait":0,"legacy":0,"orderTable":155,"orderDeck":205},</text:p>
          </table:table-cell>
          <table:table-cell table:number-columns-repeated="16347"/>
        </table:table-row>
        <table:table-row table:style-name="ro2">
          <table:table-cell office:value-type="float" office:value="156" calcext:value-type="float">
            <text:p>156</text:p>
          </table:table-cell>
          <table:table-cell office:value-type="float" office:value="159" calcext:value-type="float">
            <text:p>159</text:p>
          </table:table-cell>
          <table:table-cell office:value-type="string" calcext:value-type="string">
            <text:p>2-24</text:p>
          </table:table-cell>
          <table:table-cell office:value-type="float" office:value="24" calcext:value-type="float">
            <text:p>24</text:p>
          </table:table-cell>
          <table:table-cell office:value-type="string" calcext:value-type="string">
            <text:p>山田長政</text:p>
          </table:table-cell>
          <table:table-cell office:value-type="string" calcext:value-type="string">
            <text:p>やまだながまさ</text:p>
          </table:table-cell>
          <table:table-cell office:value-type="string" calcext:value-type="string">
            <text:p>第２弾ブースターパック</text:p>
          </table:table-cell>
          <table:table-cell table:formula="of:=VLOOKUP([.G157];[$収録番号.$A$1:$収録番号.$B$9];2;0)" office:value-type="float" office:value="25" calcext:value-type="float">
            <text:p>25</text:p>
          </table:table-cell>
          <table:table-cell office:value-type="string" calcext:value-type="string">
            <text:p>N</text:p>
          </table:table-cell>
          <table:table-cell table:formula="of:=VLOOKUP([.I157];[$レアリティ番号.$A$1:$レアリティ番号.$B$4];2;0)" office:value-type="float" office:value="1" calcext:value-type="float">
            <text:p>1</text:p>
          </table:table-cell>
          <table:table-cell office:value-type="string" calcext:value-type="string">
            <text:p>イジン</text:p>
          </table:table-cell>
          <table:table-cell table:formula="of:=VLOOKUP([.K157];[$種類番号.$A$1:$種類番号.$B$4];2;0)" office:value-type="float" office:value="1" calcext:value-type="float">
            <text:p>1</text:p>
          </table:table-cell>
          <table:table-cell office:value-type="string" calcext:value-type="string">
            <text:p>青</text:p>
          </table:table-cell>
          <table:table-cell table:formula="of:=VLOOKUP([.M157];[$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航海</text:p>
          </table:table-cell>
          <table:table-cell table:formula="of:=IFERROR(VLOOKUP([.$Q157];[$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157];[$特性番号.$A$1:$特性番号.$B$8];2;0);0)" office:value-type="float" office:value="0" calcext:value-type="float">
            <text:p>0</text:p>
          </table:table-cell>
          <table:table-cell office:value-type="string" calcext:value-type="string">
            <text:p>航海 - アタッカーになったとき、相手の戦場のイジン1体を指定して発動できる。次のブロックステップに際し、そのイジンは、これをブロックする。</text:p>
          </table:table-cell>
          <table:table-cell table:style-name="ce8" office:value-type="string" calcext:value-type="string">
            <text:p>1ドローする</text:p>
          </table:table-cell>
          <table:table-cell table:formula="of:=IFERROR(VLOOKUP([.$V157];[$遺業能力番号.$A$1:$遺業能力番号.$B$9];2;0);0)" office:value-type="float" office:value="4" calcext:value-type="float">
            <text:p>4</text:p>
          </table:table-cell>
          <table:table-cell office:value-type="string" calcext:value-type="string">
            <text:p>https://one-draw.jp/ijinden/cardlist/002/card/02_024.png</text:p>
          </table:table-cell>
          <table:table-cell table:formula="of:=CONCATENATE([$JSON.$A$1];[.$C157];[$JSON.$B$1];[.$E157];[$JSON.$C$1];[.$F157];[$JSON.$D$1];IF(ISNA([.$S157]);&quot;null&quot;;&quot;&quot;&quot;&quot;&amp;[.$S157]&amp;&quot;&quot;&quot;&quot;);[$JSON.$E$1];[.$U157];[$JSON.$F$1];IF(ISNA([.$V157]);&quot;null&quot;;&quot;&quot;&quot;&quot;&amp;[.$V157]&amp;&quot;&quot;&quot;&quot;);[$JSON.$G$1];[.$X157];[$JSON.$H$1];[.$H157];[$JSON.$I$1];[.J157];[$JSON.$J$1];[.$L157];[$JSON.$K$1];[.$O157];[$JSON.$L$1];[.$N157];[$JSON.$M$1];[.$R157];[$JSON.$N$1];[.$T157];[$JSON.$O$1];[.$W157];[$JSON.$P$1];[.$A157];[$JSON.$Q$1];[.$B157];[$JSON.$R$1])" office:value-type="string" office:string-value="{&quot;id&quot;:&quot;2-24&quot;,&quot;name&quot;:&quot;山田長政&quot;,&quot;kana&quot;:&quot;やまだながまさ&quot;,&quot;traitText&quot;:null,&quot;ruleText&quot;:&quot;航海 - アタッカーになったとき、相手の戦場のイジン1体を指定して発動できる。次のブロックステップに際し、そのイジンは、これをブロックする。&quot;,&quot;legacyText&quot;:&quot;1ドローする&quot;,&quot;imageUrl&quot;:&quot;https://one-draw.jp/ijinden/cardlist/002/card/02_024.png&quot;,&quot;expansion&quot;:25,&quot;rarity&quot;:1,&quot;type&quot;:1,&quot;level&quot;:5,&quot;color&quot;:2,&quot;term&quot;:1,&quot;trait&quot;:0,&quot;legacy&quot;:4,&quot;orderTable&quot;:156,&quot;orderDeck&quot;:159}," calcext:value-type="string">
            <text:p>{"id":"2-24","name":"山田長政","kana":"やまだながまさ","traitText":null,"ruleText":"航海 - アタッカーになったとき、相手の戦場のイジン1体を指定して発動できる。次のブロックステップに際し、そのイジンは、これをブロックする。","legacyText":"1ドローする","imageUrl":"https://one-draw.jp/ijinden/cardlist/002/card/02_024.png","expansion":25,"rarity":1,"type":1,"level":5,"color":2,"term":1,"trait":0,"legacy":4,"orderTable":156,"orderDeck":159},</text:p>
          </table:table-cell>
          <table:table-cell table:number-columns-repeated="16347"/>
        </table:table-row>
        <table:table-row table:style-name="ro2">
          <table:table-cell office:value-type="float" office:value="157" calcext:value-type="float">
            <text:p>157</text:p>
          </table:table-cell>
          <table:table-cell office:value-type="float" office:value="194" calcext:value-type="float">
            <text:p>194</text:p>
          </table:table-cell>
          <table:table-cell office:value-type="string" calcext:value-type="string">
            <text:p>2-25</text:p>
          </table:table-cell>
          <table:table-cell office:value-type="float" office:value="25" calcext:value-type="float">
            <text:p>25</text:p>
          </table:table-cell>
          <table:table-cell office:value-type="string" calcext:value-type="string">
            <text:p>運慶</text:p>
          </table:table-cell>
          <table:table-cell office:value-type="string" calcext:value-type="string">
            <text:p>うんけい</text:p>
          </table:table-cell>
          <table:table-cell office:value-type="string" calcext:value-type="string">
            <text:p>第２弾ブースターパック</text:p>
          </table:table-cell>
          <table:table-cell table:formula="of:=VLOOKUP([.G158];[$収録番号.$A$1:$収録番号.$B$9];2;0)" office:value-type="float" office:value="25" calcext:value-type="float">
            <text:p>25</text:p>
          </table:table-cell>
          <table:table-cell office:value-type="string" calcext:value-type="string">
            <text:p>N</text:p>
          </table:table-cell>
          <table:table-cell table:formula="of:=VLOOKUP([.I158];[$レアリティ番号.$A$1:$レアリティ番号.$B$4];2;0)" office:value-type="float" office:value="1" calcext:value-type="float">
            <text:p>1</text:p>
          </table:table-cell>
          <table:table-cell office:value-type="string" calcext:value-type="string">
            <text:p>イジン</text:p>
          </table:table-cell>
          <table:table-cell table:formula="of:=VLOOKUP([.K158];[$種類番号.$A$1:$種類番号.$B$4];2;0)" office:value-type="float" office:value="1" calcext:value-type="float">
            <text:p>1</text:p>
          </table:table-cell>
          <table:table-cell office:value-type="string" calcext:value-type="string">
            <text:p>緑</text:p>
          </table:table-cell>
          <table:table-cell table:formula="of:=VLOOKUP([.M158];[$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58];[$特性番号.$A$1:$特性番号.$B$8];2;0);0)" office:value-type="float" office:value="0" calcext:value-type="float">
            <text:p>0</text:p>
          </table:table-cell>
          <table:table-cell office:value-type="string" calcext:value-type="string">
            <text:p>戦場に置かれたとき、自分の戦場のハイケイ1つにつき1ドローする。¶自分の戦場のハイケイ1つにつき「パワー+500」を得る。</text:p>
          </table:table-cell>
          <table:table-cell table:style-name="ce8" table:formula="of:=NA()" office:value-type="string" office:string-value="" calcext:value-type="error">
            <text:p>#N/A</text:p>
          </table:table-cell>
          <table:table-cell table:formula="of:=IFERROR(VLOOKUP([.$V158];[$遺業能力番号.$A$1:$遺業能力番号.$B$9];2;0);0)" office:value-type="float" office:value="0" calcext:value-type="float">
            <text:p>0</text:p>
          </table:table-cell>
          <table:table-cell office:value-type="string" calcext:value-type="string">
            <text:p>https://one-draw.jp/ijinden/cardlist/002/card/02_025.png</text:p>
          </table:table-cell>
          <table:table-cell table:formula="of:=CONCATENATE([$JSON.$A$1];[.$C158];[$JSON.$B$1];[.$E158];[$JSON.$C$1];[.$F158];[$JSON.$D$1];IF(ISNA([.$S158]);&quot;null&quot;;&quot;&quot;&quot;&quot;&amp;[.$S158]&amp;&quot;&quot;&quot;&quot;);[$JSON.$E$1];[.$U158];[$JSON.$F$1];IF(ISNA([.$V158]);&quot;null&quot;;&quot;&quot;&quot;&quot;&amp;[.$V158]&amp;&quot;&quot;&quot;&quot;);[$JSON.$G$1];[.$X158];[$JSON.$H$1];[.$H158];[$JSON.$I$1];[.J158];[$JSON.$J$1];[.$L158];[$JSON.$K$1];[.$O158];[$JSON.$L$1];[.$N158];[$JSON.$M$1];[.$R158];[$JSON.$N$1];[.$T158];[$JSON.$O$1];[.$W158];[$JSON.$P$1];[.$A158];[$JSON.$Q$1];[.$B158];[$JSON.$R$1])" office:value-type="string" office:string-value="{&quot;id&quot;:&quot;2-25&quot;,&quot;name&quot;:&quot;運慶&quot;,&quot;kana&quot;:&quot;うんけい&quot;,&quot;traitText&quot;:null,&quot;ruleText&quot;:&quot;戦場に置かれたとき、自分の戦場のハイケイ1つにつき1ドローする。¶自分の戦場のハイケイ1つにつき「パワー+500」を得る。&quot;,&quot;legacyText&quot;:null,&quot;imageUrl&quot;:&quot;https://one-draw.jp/ijinden/cardlist/002/card/02_025.png&quot;,&quot;expansion&quot;:25,&quot;rarity&quot;:1,&quot;type&quot;:1,&quot;level&quot;:6,&quot;color&quot;:4,&quot;term&quot;:0,&quot;trait&quot;:0,&quot;legacy&quot;:0,&quot;orderTable&quot;:157,&quot;orderDeck&quot;:194}," calcext:value-type="string">
            <text:p>{"id":"2-25","name":"運慶","kana":"うんけい","traitText":null,"ruleText":"戦場に置かれたとき、自分の戦場のハイケイ1つにつき1ドローする。¶自分の戦場のハイケイ1つにつき「パワー+500」を得る。","legacyText":null,"imageUrl":"https://one-draw.jp/ijinden/cardlist/002/card/02_025.png","expansion":25,"rarity":1,"type":1,"level":6,"color":4,"term":0,"trait":0,"legacy":0,"orderTable":157,"orderDeck":194},</text:p>
          </table:table-cell>
          <table:table-cell table:number-columns-repeated="16347"/>
        </table:table-row>
        <table:table-row table:style-name="ro2">
          <table:table-cell office:value-type="float" office:value="158" calcext:value-type="float">
            <text:p>158</text:p>
          </table:table-cell>
          <table:table-cell office:value-type="float" office:value="47" calcext:value-type="float">
            <text:p>47</text:p>
          </table:table-cell>
          <table:table-cell office:value-type="string" calcext:value-type="string">
            <text:p>2-26</text:p>
          </table:table-cell>
          <table:table-cell office:value-type="float" office:value="26" calcext:value-type="float">
            <text:p>26</text:p>
          </table:table-cell>
          <table:table-cell office:value-type="string" calcext:value-type="string">
            <text:p>ハリエット・ビーチャー・ストウ</text:p>
          </table:table-cell>
          <table:table-cell office:value-type="string" calcext:value-type="string">
            <text:p>はりえっとびーちゃーすとう</text:p>
          </table:table-cell>
          <table:table-cell office:value-type="string" calcext:value-type="string">
            <text:p>第２弾ブースターパック</text:p>
          </table:table-cell>
          <table:table-cell table:formula="of:=VLOOKUP([.G159];[$収録番号.$A$1:$収録番号.$B$9];2;0)" office:value-type="float" office:value="25" calcext:value-type="float">
            <text:p>25</text:p>
          </table:table-cell>
          <table:table-cell office:value-type="string" calcext:value-type="string">
            <text:p>R</text:p>
          </table:table-cell>
          <table:table-cell table:formula="of:=VLOOKUP([.I159];[$レアリティ番号.$A$1:$レアリティ番号.$B$4];2;0)" office:value-type="float" office:value="2" calcext:value-type="float">
            <text:p>2</text:p>
          </table:table-cell>
          <table:table-cell office:value-type="string" calcext:value-type="string">
            <text:p>イジン</text:p>
          </table:table-cell>
          <table:table-cell table:formula="of:=VLOOKUP([.K159];[$種類番号.$A$1:$種類番号.$B$4];2;0)" office:value-type="float" office:value="1" calcext:value-type="float">
            <text:p>1</text:p>
          </table:table-cell>
          <table:table-cell office:value-type="string" calcext:value-type="string">
            <text:p>緑</text:p>
          </table:table-cell>
          <table:table-cell table:formula="of:=VLOOKUP([.M15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Q159];[$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159];[$特性番号.$A$1:$特性番号.$B$8];2;0);0)" office:value-type="float" office:value="0" calcext:value-type="float">
            <text:p>0</text:p>
          </table:table-cell>
          <table:table-cell office:value-type="string" calcext:value-type="string">
            <text:p>執筆 - この能力は、このターンにバトルしているなら発動しない。ハイケイが戦場に置かれたときに発動できる。ターンプレイヤーは1ドローして、このターンの間、バトルできない。</text:p>
          </table:table-cell>
          <table:table-cell table:style-name="ce8" office:value-type="string" calcext:value-type="string">
            <text:p>1ドローする</text:p>
          </table:table-cell>
          <table:table-cell table:formula="of:=IFERROR(VLOOKUP([.$V159];[$遺業能力番号.$A$1:$遺業能力番号.$B$9];2;0);0)" office:value-type="float" office:value="4" calcext:value-type="float">
            <text:p>4</text:p>
          </table:table-cell>
          <table:table-cell office:value-type="string" calcext:value-type="string">
            <text:p>https://one-draw.jp/ijinden/cardlist/002/card/02_026.png</text:p>
          </table:table-cell>
          <table:table-cell table:formula="of:=CONCATENATE([$JSON.$A$1];[.$C159];[$JSON.$B$1];[.$E159];[$JSON.$C$1];[.$F159];[$JSON.$D$1];IF(ISNA([.$S159]);&quot;null&quot;;&quot;&quot;&quot;&quot;&amp;[.$S159]&amp;&quot;&quot;&quot;&quot;);[$JSON.$E$1];[.$U159];[$JSON.$F$1];IF(ISNA([.$V159]);&quot;null&quot;;&quot;&quot;&quot;&quot;&amp;[.$V159]&amp;&quot;&quot;&quot;&quot;);[$JSON.$G$1];[.$X159];[$JSON.$H$1];[.$H159];[$JSON.$I$1];[.J159];[$JSON.$J$1];[.$L159];[$JSON.$K$1];[.$O159];[$JSON.$L$1];[.$N159];[$JSON.$M$1];[.$R159];[$JSON.$N$1];[.$T159];[$JSON.$O$1];[.$W159];[$JSON.$P$1];[.$A159];[$JSON.$Q$1];[.$B159];[$JSON.$R$1])" office:value-type="string" office:string-value="{&quot;id&quot;:&quot;2-26&quot;,&quot;name&quot;:&quot;ハリエット・ビーチャー・ストウ&quot;,&quot;kana&quot;:&quot;はりえっとびーちゃーすとう&quot;,&quot;traitText&quot;:null,&quot;ruleText&quot;:&quot;執筆 - この能力は、このターンにバトルしているなら発動しない。ハイケイが戦場に置かれたときに発動できる。ターンプレイヤーは1ドローして、このターンの間、バトルできない。&quot;,&quot;legacyText&quot;:&quot;1ドローする&quot;,&quot;imageUrl&quot;:&quot;https://one-draw.jp/ijinden/cardlist/002/card/02_026.png&quot;,&quot;expansion&quot;:25,&quot;rarity&quot;:2,&quot;type&quot;:1,&quot;level&quot;:2,&quot;color&quot;:4,&quot;term&quot;:2,&quot;trait&quot;:0,&quot;legacy&quot;:4,&quot;orderTable&quot;:158,&quot;orderDeck&quot;:47}," calcext:value-type="string">
            <text:p>{"id":"2-26","name":"ハリエット・ビーチャー・ストウ","kana":"はりえっとびーちゃーすとう","traitText":null,"ruleText":"執筆 - この能力は、このターンにバトルしているなら発動しない。ハイケイが戦場に置かれたときに発動できる。ターンプレイヤーは1ドローして、このターンの間、バトルできない。","legacyText":"1ドローする","imageUrl":"https://one-draw.jp/ijinden/cardlist/002/card/02_026.png","expansion":25,"rarity":2,"type":1,"level":2,"color":4,"term":2,"trait":0,"legacy":4,"orderTable":158,"orderDeck":47},</text:p>
          </table:table-cell>
          <table:table-cell table:number-columns-repeated="16347"/>
        </table:table-row>
        <table:table-row table:style-name="ro2">
          <table:table-cell office:value-type="float" office:value="159" calcext:value-type="float">
            <text:p>159</text:p>
          </table:table-cell>
          <table:table-cell office:value-type="float" office:value="89" calcext:value-type="float">
            <text:p>89</text:p>
          </table:table-cell>
          <table:table-cell office:value-type="string" calcext:value-type="string">
            <text:p>2-27</text:p>
          </table:table-cell>
          <table:table-cell office:value-type="float" office:value="27" calcext:value-type="float">
            <text:p>27</text:p>
          </table:table-cell>
          <table:table-cell office:value-type="string" calcext:value-type="string">
            <text:p>コシャマイン</text:p>
          </table:table-cell>
          <table:table-cell office:value-type="string" calcext:value-type="string">
            <text:p>こしゃまいん</text:p>
          </table:table-cell>
          <table:table-cell office:value-type="string" calcext:value-type="string">
            <text:p>第２弾ブースターパック</text:p>
          </table:table-cell>
          <table:table-cell table:formula="of:=VLOOKUP([.G160];[$収録番号.$A$1:$収録番号.$B$9];2;0)" office:value-type="float" office:value="25" calcext:value-type="float">
            <text:p>25</text:p>
          </table:table-cell>
          <table:table-cell office:value-type="string" calcext:value-type="string">
            <text:p>R</text:p>
          </table:table-cell>
          <table:table-cell table:formula="of:=VLOOKUP([.I160];[$レアリティ番号.$A$1:$レアリティ番号.$B$4];2;0)" office:value-type="float" office:value="2" calcext:value-type="float">
            <text:p>2</text:p>
          </table:table-cell>
          <table:table-cell office:value-type="string" calcext:value-type="string">
            <text:p>イジン</text:p>
          </table:table-cell>
          <table:table-cell table:formula="of:=VLOOKUP([.K160];[$種類番号.$A$1:$種類番号.$B$4];2;0)" office:value-type="float" office:value="1" calcext:value-type="float">
            <text:p>1</text:p>
          </table:table-cell>
          <table:table-cell office:value-type="string" calcext:value-type="string">
            <text:p>緑</text:p>
          </table:table-cell>
          <table:table-cell table:formula="of:=VLOOKUP([.M160];[$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決起</text:p>
          </table:table-cell>
          <table:table-cell table:formula="of:=IFERROR(VLOOKUP([.$Q160];[$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S160];[$特性番号.$A$1:$特性番号.$B$8];2;0);0)" office:value-type="float" office:value="0" calcext:value-type="float">
            <text:p>0</text:p>
          </table:table-cell>
          <table:table-cell office:value-type="string" calcext:value-type="string">
            <text:p>決起 - マリョク配置によってカードが自分の魔力ゾーンに置かれたとき、自分の魔力ゾーンのマリョクが4つ以上なら発動できる。このターンの間、自分の魔力ゾーンの『ストーン』マリョクは「レベル+1」される。</text:p>
          </table:table-cell>
          <table:table-cell table:style-name="ce8" office:value-type="string" calcext:value-type="string">
            <text:p>反魂</text:p>
          </table:table-cell>
          <table:table-cell table:formula="of:=IFERROR(VLOOKUP([.$V160];[$遺業能力番号.$A$1:$遺業能力番号.$B$9];2;0);0)" office:value-type="float" office:value="6" calcext:value-type="float">
            <text:p>6</text:p>
          </table:table-cell>
          <table:table-cell office:value-type="string" calcext:value-type="string">
            <text:p>https://one-draw.jp/ijinden/cardlist/002/card/02_027.png</text:p>
          </table:table-cell>
          <table:table-cell table:formula="of:=CONCATENATE([$JSON.$A$1];[.$C160];[$JSON.$B$1];[.$E160];[$JSON.$C$1];[.$F160];[$JSON.$D$1];IF(ISNA([.$S160]);&quot;null&quot;;&quot;&quot;&quot;&quot;&amp;[.$S160]&amp;&quot;&quot;&quot;&quot;);[$JSON.$E$1];[.$U160];[$JSON.$F$1];IF(ISNA([.$V160]);&quot;null&quot;;&quot;&quot;&quot;&quot;&amp;[.$V160]&amp;&quot;&quot;&quot;&quot;);[$JSON.$G$1];[.$X160];[$JSON.$H$1];[.$H160];[$JSON.$I$1];[.J160];[$JSON.$J$1];[.$L160];[$JSON.$K$1];[.$O160];[$JSON.$L$1];[.$N160];[$JSON.$M$1];[.$R160];[$JSON.$N$1];[.$T160];[$JSON.$O$1];[.$W160];[$JSON.$P$1];[.$A160];[$JSON.$Q$1];[.$B160];[$JSON.$R$1])" office:value-type="string" office:string-value="{&quot;id&quot;:&quot;2-27&quot;,&quot;name&quot;:&quot;コシャマイン&quot;,&quot;kana&quot;:&quot;こしゃまいん&quot;,&quot;traitText&quot;:null,&quot;ruleText&quot;:&quot;決起 - マリョク配置によってカードが自分の魔力ゾーンに置かれたとき、自分の魔力ゾーンのマリョクが4つ以上なら発動できる。このターンの間、自分の魔力ゾーンの『ストーン』マリョクは「レベル+1」される。&quot;,&quot;legacyText&quot;:&quot;反魂&quot;,&quot;imageUrl&quot;:&quot;https://one-draw.jp/ijinden/cardlist/002/card/02_027.png&quot;,&quot;expansion&quot;:25,&quot;rarity&quot;:2,&quot;type&quot;:1,&quot;level&quot;:3,&quot;color&quot;:4,&quot;term&quot;:4,&quot;trait&quot;:0,&quot;legacy&quot;:6,&quot;orderTable&quot;:159,&quot;orderDeck&quot;:89}," calcext:value-type="string">
            <text:p>{"id":"2-27","name":"コシャマイン","kana":"こしゃまいん","traitText":null,"ruleText":"決起 - マリョク配置によってカードが自分の魔力ゾーンに置かれたとき、自分の魔力ゾーンのマリョクが4つ以上なら発動できる。このターンの間、自分の魔力ゾーンの『ストーン』マリョクは「レベル+1」される。","legacyText":"反魂","imageUrl":"https://one-draw.jp/ijinden/cardlist/002/card/02_027.png","expansion":25,"rarity":2,"type":1,"level":3,"color":4,"term":4,"trait":0,"legacy":6,"orderTable":159,"orderDeck":89},</text:p>
          </table:table-cell>
          <table:table-cell table:number-columns-repeated="16347"/>
        </table:table-row>
        <table:table-row table:style-name="ro2">
          <table:table-cell office:value-type="float" office:value="160" calcext:value-type="float">
            <text:p>160</text:p>
          </table:table-cell>
          <table:table-cell office:value-type="float" office:value="210" calcext:value-type="float">
            <text:p>210</text:p>
          </table:table-cell>
          <table:table-cell office:value-type="string" calcext:value-type="string">
            <text:p>2-28</text:p>
          </table:table-cell>
          <table:table-cell office:value-type="float" office:value="28" calcext:value-type="float">
            <text:p>28</text:p>
          </table:table-cell>
          <table:table-cell office:value-type="string" calcext:value-type="string">
            <text:p>狩野山楽</text:p>
          </table:table-cell>
          <table:table-cell office:value-type="string" calcext:value-type="string">
            <text:p>かのうさんらく</text:p>
          </table:table-cell>
          <table:table-cell office:value-type="string" calcext:value-type="string">
            <text:p>第２弾ブースターパック</text:p>
          </table:table-cell>
          <table:table-cell table:formula="of:=VLOOKUP([.G161];[$収録番号.$A$1:$収録番号.$B$9];2;0)" office:value-type="float" office:value="25" calcext:value-type="float">
            <text:p>25</text:p>
          </table:table-cell>
          <table:table-cell office:value-type="string" calcext:value-type="string">
            <text:p>N</text:p>
          </table:table-cell>
          <table:table-cell table:formula="of:=VLOOKUP([.I161];[$レアリティ番号.$A$1:$レアリティ番号.$B$4];2;0)" office:value-type="float" office:value="1" calcext:value-type="float">
            <text:p>1</text:p>
          </table:table-cell>
          <table:table-cell office:value-type="string" calcext:value-type="string">
            <text:p>イジン</text:p>
          </table:table-cell>
          <table:table-cell table:formula="of:=VLOOKUP([.K161];[$種類番号.$A$1:$種類番号.$B$4];2;0)" office:value-type="float" office:value="1" calcext:value-type="float">
            <text:p>1</text:p>
          </table:table-cell>
          <table:table-cell office:value-type="string" calcext:value-type="string">
            <text:p>緑</text:p>
          </table:table-cell>
          <table:table-cell table:formula="of:=VLOOKUP([.M161];[$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1];[$能力語番号.$A$1:$能力語番号.$B$10];2;0);0)" office:value-type="float" office:value="0" calcext:value-type="float">
            <text:p>0</text:p>
          </table:table-cell>
          <table:table-cell office:value-type="string" calcext:value-type="string">
            <text:p>美術</text:p>
          </table:table-cell>
          <table:table-cell table:formula="of:=IFERROR(VLOOKUP([.$S161];[$特性番号.$A$1:$特性番号.$B$8];2;0);0)" office:value-type="float" office:value="2" calcext:value-type="float">
            <text:p>2</text:p>
          </table:table-cell>
          <table:table-cell office:value-type="string" calcext:value-type="string">
            <text:p>戦場に置かれたとき、赤のイジンが戦場にいるなら発動する。1ドローして、イジン召喚権+1する。</text:p>
          </table:table-cell>
          <table:table-cell table:style-name="ce8" office:value-type="string" calcext:value-type="string">
            <text:p>1ドローする</text:p>
          </table:table-cell>
          <table:table-cell table:formula="of:=IFERROR(VLOOKUP([.$V161];[$遺業能力番号.$A$1:$遺業能力番号.$B$9];2;0);0)" office:value-type="float" office:value="4" calcext:value-type="float">
            <text:p>4</text:p>
          </table:table-cell>
          <table:table-cell office:value-type="string" calcext:value-type="string">
            <text:p>https://one-draw.jp/ijinden/cardlist/002/card/02_028.png</text:p>
          </table:table-cell>
          <table:table-cell table:formula="of:=CONCATENATE([$JSON.$A$1];[.$C161];[$JSON.$B$1];[.$E161];[$JSON.$C$1];[.$F161];[$JSON.$D$1];IF(ISNA([.$S161]);&quot;null&quot;;&quot;&quot;&quot;&quot;&amp;[.$S161]&amp;&quot;&quot;&quot;&quot;);[$JSON.$E$1];[.$U161];[$JSON.$F$1];IF(ISNA([.$V161]);&quot;null&quot;;&quot;&quot;&quot;&quot;&amp;[.$V161]&amp;&quot;&quot;&quot;&quot;);[$JSON.$G$1];[.$X161];[$JSON.$H$1];[.$H161];[$JSON.$I$1];[.J161];[$JSON.$J$1];[.$L161];[$JSON.$K$1];[.$O161];[$JSON.$L$1];[.$N161];[$JSON.$M$1];[.$R161];[$JSON.$N$1];[.$T161];[$JSON.$O$1];[.$W161];[$JSON.$P$1];[.$A161];[$JSON.$Q$1];[.$B161];[$JSON.$R$1])" office:value-type="string" office:string-value="{&quot;id&quot;:&quot;2-28&quot;,&quot;name&quot;:&quot;狩野山楽&quot;,&quot;kana&quot;:&quot;かのうさんらく&quot;,&quot;traitText&quot;:&quot;美術&quot;,&quot;ruleText&quot;:&quot;戦場に置かれたとき、赤のイジンが戦場にいるなら発動する。1ドローして、イジン召喚権+1する。&quot;,&quot;legacyText&quot;:&quot;1ドローする&quot;,&quot;imageUrl&quot;:&quot;https://one-draw.jp/ijinden/cardlist/002/card/02_028.png&quot;,&quot;expansion&quot;:25,&quot;rarity&quot;:1,&quot;type&quot;:1,&quot;level&quot;:7,&quot;color&quot;:4,&quot;term&quot;:0,&quot;trait&quot;:2,&quot;legacy&quot;:4,&quot;orderTable&quot;:160,&quot;orderDeck&quot;:210}," calcext:value-type="string">
            <text:p>{"id":"2-28","name":"狩野山楽","kana":"かのうさんらく","traitText":"美術","ruleText":"戦場に置かれたとき、赤のイジンが戦場にいるなら発動する。1ドローして、イジン召喚権+1する。","legacyText":"1ドローする","imageUrl":"https://one-draw.jp/ijinden/cardlist/002/card/02_028.png","expansion":25,"rarity":1,"type":1,"level":7,"color":4,"term":0,"trait":2,"legacy":4,"orderTable":160,"orderDeck":210},</text:p>
          </table:table-cell>
          <table:table-cell table:number-columns-repeated="16347"/>
        </table:table-row>
        <table:table-row table:style-name="ro2">
          <table:table-cell office:value-type="float" office:value="161" calcext:value-type="float">
            <text:p>161</text:p>
          </table:table-cell>
          <table:table-cell office:value-type="float" office:value="128" calcext:value-type="float">
            <text:p>128</text:p>
          </table:table-cell>
          <table:table-cell office:value-type="string" calcext:value-type="string">
            <text:p>2-29</text:p>
          </table:table-cell>
          <table:table-cell office:value-type="float" office:value="29" calcext:value-type="float">
            <text:p>29</text:p>
          </table:table-cell>
          <table:table-cell office:value-type="string" calcext:value-type="string">
            <text:p>徳川家光</text:p>
          </table:table-cell>
          <table:table-cell office:value-type="string" calcext:value-type="string">
            <text:p>とくがわいえみつ</text:p>
          </table:table-cell>
          <table:table-cell office:value-type="string" calcext:value-type="string">
            <text:p>第２弾ブースターパック</text:p>
          </table:table-cell>
          <table:table-cell table:formula="of:=VLOOKUP([.G162];[$収録番号.$A$1:$収録番号.$B$9];2;0)" office:value-type="float" office:value="25" calcext:value-type="float">
            <text:p>25</text:p>
          </table:table-cell>
          <table:table-cell office:value-type="string" calcext:value-type="string">
            <text:p>N</text:p>
          </table:table-cell>
          <table:table-cell table:formula="of:=VLOOKUP([.I162];[$レアリティ番号.$A$1:$レアリティ番号.$B$4];2;0)" office:value-type="float" office:value="1" calcext:value-type="float">
            <text:p>1</text:p>
          </table:table-cell>
          <table:table-cell office:value-type="string" calcext:value-type="string">
            <text:p>イジン</text:p>
          </table:table-cell>
          <table:table-cell table:formula="of:=VLOOKUP([.K162];[$種類番号.$A$1:$種類番号.$B$4];2;0)" office:value-type="float" office:value="1" calcext:value-type="float">
            <text:p>1</text:p>
          </table:table-cell>
          <table:table-cell office:value-type="string" calcext:value-type="string">
            <text:p>緑</text:p>
          </table:table-cell>
          <table:table-cell table:formula="of:=VLOOKUP([.M162];[$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62];[$特性番号.$A$1:$特性番号.$B$8];2;0);0)" office:value-type="float" office:value="0" calcext:value-type="float">
            <text:p>0</text:p>
          </table:table-cell>
          <table:table-cell office:value-type="string" calcext:value-type="string">
            <text:p>戦場に置かれたとき、自分の魔力ゾーンのマリョク1つを裏にして発動できる。自分の戦場にある色1つにつきイジン召喚権+1する。</text:p>
          </table:table-cell>
          <table:table-cell table:style-name="ce8" office:value-type="string" calcext:value-type="string">
            <text:p>1ドローする</text:p>
          </table:table-cell>
          <table:table-cell table:formula="of:=IFERROR(VLOOKUP([.$V162];[$遺業能力番号.$A$1:$遺業能力番号.$B$9];2;0);0)" office:value-type="float" office:value="4" calcext:value-type="float">
            <text:p>4</text:p>
          </table:table-cell>
          <table:table-cell office:value-type="string" calcext:value-type="string">
            <text:p>https://one-draw.jp/ijinden/cardlist/002/card/02_029.png</text:p>
          </table:table-cell>
          <table:table-cell table:formula="of:=CONCATENATE([$JSON.$A$1];[.$C162];[$JSON.$B$1];[.$E162];[$JSON.$C$1];[.$F162];[$JSON.$D$1];IF(ISNA([.$S162]);&quot;null&quot;;&quot;&quot;&quot;&quot;&amp;[.$S162]&amp;&quot;&quot;&quot;&quot;);[$JSON.$E$1];[.$U162];[$JSON.$F$1];IF(ISNA([.$V162]);&quot;null&quot;;&quot;&quot;&quot;&quot;&amp;[.$V162]&amp;&quot;&quot;&quot;&quot;);[$JSON.$G$1];[.$X162];[$JSON.$H$1];[.$H162];[$JSON.$I$1];[.J162];[$JSON.$J$1];[.$L162];[$JSON.$K$1];[.$O162];[$JSON.$L$1];[.$N162];[$JSON.$M$1];[.$R162];[$JSON.$N$1];[.$T162];[$JSON.$O$1];[.$W162];[$JSON.$P$1];[.$A162];[$JSON.$Q$1];[.$B162];[$JSON.$R$1])" office:value-type="string" office:string-value="{&quot;id&quot;:&quot;2-29&quot;,&quot;name&quot;:&quot;徳川家光&quot;,&quot;kana&quot;:&quot;とくがわいえみつ&quot;,&quot;traitText&quot;:null,&quot;ruleText&quot;:&quot;戦場に置かれたとき、自分の魔力ゾーンのマリョク1つを裏にして発動できる。自分の戦場にある色1つにつきイジン召喚権+1する。&quot;,&quot;legacyText&quot;:&quot;1ドローする&quot;,&quot;imageUrl&quot;:&quot;https://one-draw.jp/ijinden/cardlist/002/card/02_029.png&quot;,&quot;expansion&quot;:25,&quot;rarity&quot;:1,&quot;type&quot;:1,&quot;level&quot;:4,&quot;color&quot;:4,&quot;term&quot;:0,&quot;trait&quot;:0,&quot;legacy&quot;:4,&quot;orderTable&quot;:161,&quot;orderDeck&quot;:128}," calcext:value-type="string">
            <text:p>{"id":"2-29","name":"徳川家光","kana":"とくがわいえみつ","traitText":null,"ruleText":"戦場に置かれたとき、自分の魔力ゾーンのマリョク1つを裏にして発動できる。自分の戦場にある色1つにつきイジン召喚権+1する。","legacyText":"1ドローする","imageUrl":"https://one-draw.jp/ijinden/cardlist/002/card/02_029.png","expansion":25,"rarity":1,"type":1,"level":4,"color":4,"term":0,"trait":0,"legacy":4,"orderTable":161,"orderDeck":128},</text:p>
          </table:table-cell>
          <table:table-cell table:number-columns-repeated="16347"/>
        </table:table-row>
        <table:table-row table:style-name="ro2">
          <table:table-cell office:value-type="float" office:value="162" calcext:value-type="float">
            <text:p>162</text:p>
          </table:table-cell>
          <table:table-cell office:value-type="float" office:value="168" calcext:value-type="float">
            <text:p>168</text:p>
          </table:table-cell>
          <table:table-cell office:value-type="string" calcext:value-type="string">
            <text:p>2-30</text:p>
          </table:table-cell>
          <table:table-cell office:value-type="float" office:value="30" calcext:value-type="float">
            <text:p>30</text:p>
          </table:table-cell>
          <table:table-cell office:value-type="string" calcext:value-type="string">
            <text:p>徳川綱吉</text:p>
          </table:table-cell>
          <table:table-cell office:value-type="string" calcext:value-type="string">
            <text:p>とくがわつなよし</text:p>
          </table:table-cell>
          <table:table-cell office:value-type="string" calcext:value-type="string">
            <text:p>第２弾ブースターパック</text:p>
          </table:table-cell>
          <table:table-cell table:formula="of:=VLOOKUP([.G163];[$収録番号.$A$1:$収録番号.$B$9];2;0)" office:value-type="float" office:value="25" calcext:value-type="float">
            <text:p>25</text:p>
          </table:table-cell>
          <table:table-cell office:value-type="string" calcext:value-type="string">
            <text:p>N</text:p>
          </table:table-cell>
          <table:table-cell table:formula="of:=VLOOKUP([.I163];[$レアリティ番号.$A$1:$レアリティ番号.$B$4];2;0)" office:value-type="float" office:value="1" calcext:value-type="float">
            <text:p>1</text:p>
          </table:table-cell>
          <table:table-cell office:value-type="string" calcext:value-type="string">
            <text:p>イジン</text:p>
          </table:table-cell>
          <table:table-cell table:formula="of:=VLOOKUP([.K163];[$種類番号.$A$1:$種類番号.$B$4];2;0)" office:value-type="float" office:value="1" calcext:value-type="float">
            <text:p>1</text:p>
          </table:table-cell>
          <table:table-cell office:value-type="string" calcext:value-type="string">
            <text:p>緑</text:p>
          </table:table-cell>
          <table:table-cell table:formula="of:=VLOOKUP([.M163];[$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63];[$特性番号.$A$1:$特性番号.$B$8];2;0);0)" office:value-type="float" office:value="0" calcext:value-type="float">
            <text:p>0</text:p>
          </table:table-cell>
          <table:table-cell office:value-type="string" calcext:value-type="string">
            <text:p>戦場の「剣術」イジン1体につき「パワー+2000」を得る。¶相手のエンドフェイズが開始したとき、このターンにバトルしているなら、相手の戦場のイジン1体を指定して発動できる。そのイジンを裏向きで魔力ゾーンに置く。</text:p>
          </table:table-cell>
          <table:table-cell table:style-name="ce8" office:value-type="string" calcext:value-type="string">
            <text:p>1ドローする</text:p>
          </table:table-cell>
          <table:table-cell table:formula="of:=IFERROR(VLOOKUP([.$V163];[$遺業能力番号.$A$1:$遺業能力番号.$B$9];2;0);0)" office:value-type="float" office:value="4" calcext:value-type="float">
            <text:p>4</text:p>
          </table:table-cell>
          <table:table-cell office:value-type="string" calcext:value-type="string">
            <text:p>https://one-draw.jp/ijinden/cardlist/002/card/02_030.png</text:p>
          </table:table-cell>
          <table:table-cell table:formula="of:=CONCATENATE([$JSON.$A$1];[.$C163];[$JSON.$B$1];[.$E163];[$JSON.$C$1];[.$F163];[$JSON.$D$1];IF(ISNA([.$S163]);&quot;null&quot;;&quot;&quot;&quot;&quot;&amp;[.$S163]&amp;&quot;&quot;&quot;&quot;);[$JSON.$E$1];[.$U163];[$JSON.$F$1];IF(ISNA([.$V163]);&quot;null&quot;;&quot;&quot;&quot;&quot;&amp;[.$V163]&amp;&quot;&quot;&quot;&quot;);[$JSON.$G$1];[.$X163];[$JSON.$H$1];[.$H163];[$JSON.$I$1];[.J163];[$JSON.$J$1];[.$L163];[$JSON.$K$1];[.$O163];[$JSON.$L$1];[.$N163];[$JSON.$M$1];[.$R163];[$JSON.$N$1];[.$T163];[$JSON.$O$1];[.$W163];[$JSON.$P$1];[.$A163];[$JSON.$Q$1];[.$B163];[$JSON.$R$1])" office:value-type="string" office:string-value="{&quot;id&quot;:&quot;2-30&quot;,&quot;name&quot;:&quot;徳川綱吉&quot;,&quot;kana&quot;:&quot;とくがわつなよし&quot;,&quot;traitText&quot;:null,&quot;ruleText&quot;:&quot;戦場の「剣術」イジン1体につき「パワー+2000」を得る。¶相手のエンドフェイズが開始したとき、このターンにバトルしているなら、相手の戦場のイジン1体を指定して発動できる。そのイジンを裏向きで魔力ゾーンに置く。&quot;,&quot;legacyText&quot;:&quot;1ドローする&quot;,&quot;imageUrl&quot;:&quot;https://one-draw.jp/ijinden/cardlist/002/card/02_030.png&quot;,&quot;expansion&quot;:25,&quot;rarity&quot;:1,&quot;type&quot;:1,&quot;level&quot;:5,&quot;color&quot;:4,&quot;term&quot;:0,&quot;trait&quot;:0,&quot;legacy&quot;:4,&quot;orderTable&quot;:162,&quot;orderDeck&quot;:168}," calcext:value-type="string">
            <text:p>{"id":"2-30","name":"徳川綱吉","kana":"とくがわつなよし","traitText":null,"ruleText":"戦場の「剣術」イジン1体につき「パワー+2000」を得る。¶相手のエンドフェイズが開始したとき、このターンにバトルしているなら、相手の戦場のイジン1体を指定して発動できる。そのイジンを裏向きで魔力ゾーンに置く。","legacyText":"1ドローする","imageUrl":"https://one-draw.jp/ijinden/cardlist/002/card/02_030.png","expansion":25,"rarity":1,"type":1,"level":5,"color":4,"term":0,"trait":0,"legacy":4,"orderTable":162,"orderDeck":168},</text:p>
          </table:table-cell>
          <table:table-cell table:number-columns-repeated="16347"/>
        </table:table-row>
        <table:table-row table:style-name="ro2">
          <table:table-cell office:value-type="float" office:value="163" calcext:value-type="float">
            <text:p>163</text:p>
          </table:table-cell>
          <table:table-cell office:value-type="float" office:value="223" calcext:value-type="float">
            <text:p>223</text:p>
          </table:table-cell>
          <table:table-cell office:value-type="string" calcext:value-type="string">
            <text:p>2-31</text:p>
          </table:table-cell>
          <table:table-cell office:value-type="float" office:value="31" calcext:value-type="float">
            <text:p>31</text:p>
          </table:table-cell>
          <table:table-cell office:value-type="string" calcext:value-type="string">
            <text:p>東洲斎写楽</text:p>
          </table:table-cell>
          <table:table-cell office:value-type="string" calcext:value-type="string">
            <text:p>とうしゅうさいしゃらく</text:p>
          </table:table-cell>
          <table:table-cell office:value-type="string" calcext:value-type="string">
            <text:p>第２弾ブースターパック</text:p>
          </table:table-cell>
          <table:table-cell table:formula="of:=VLOOKUP([.G164];[$収録番号.$A$1:$収録番号.$B$9];2;0)" office:value-type="float" office:value="25" calcext:value-type="float">
            <text:p>25</text:p>
          </table:table-cell>
          <table:table-cell office:value-type="string" calcext:value-type="string">
            <text:p>N</text:p>
          </table:table-cell>
          <table:table-cell table:formula="of:=VLOOKUP([.I164];[$レアリティ番号.$A$1:$レアリティ番号.$B$4];2;0)" office:value-type="float" office:value="1" calcext:value-type="float">
            <text:p>1</text:p>
          </table:table-cell>
          <table:table-cell office:value-type="string" calcext:value-type="string">
            <text:p>イジン</text:p>
          </table:table-cell>
          <table:table-cell table:formula="of:=VLOOKUP([.K164];[$種類番号.$A$1:$種類番号.$B$4];2;0)" office:value-type="float" office:value="1" calcext:value-type="float">
            <text:p>1</text:p>
          </table:table-cell>
          <table:table-cell office:value-type="string" calcext:value-type="string">
            <text:p>緑</text:p>
          </table:table-cell>
          <table:table-cell table:formula="of:=VLOOKUP([.M164];[$色番号.$A$1:$色番号.$B$10];2;0)" office:value-type="float" office:value="4" calcext:value-type="float">
            <text:p>4</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4];[$能力語番号.$A$1:$能力語番号.$B$10];2;0);0)" office:value-type="float" office:value="0" calcext:value-type="float">
            <text:p>0</text:p>
          </table:table-cell>
          <table:table-cell office:value-type="string" calcext:value-type="string">
            <text:p>美術</text:p>
          </table:table-cell>
          <table:table-cell table:formula="of:=IFERROR(VLOOKUP([.$S164];[$特性番号.$A$1:$特性番号.$B$8];2;0);0)" office:value-type="float" office:value="2" calcext:value-type="float">
            <text:p>2</text:p>
          </table:table-cell>
          <table:table-cell office:value-type="string" calcext:value-type="string">
            <text:p>破壊されたとき、自分の手札か自分の墓地のレベル7以下の「美術」カード1つを指定して発動できる。そのカードを戦場に置く。</text:p>
          </table:table-cell>
          <table:table-cell table:style-name="ce8" office:value-type="string" calcext:value-type="string">
            <text:p>1ドローする</text:p>
          </table:table-cell>
          <table:table-cell table:formula="of:=IFERROR(VLOOKUP([.$V164];[$遺業能力番号.$A$1:$遺業能力番号.$B$9];2;0);0)" office:value-type="float" office:value="4" calcext:value-type="float">
            <text:p>4</text:p>
          </table:table-cell>
          <table:table-cell office:value-type="string" calcext:value-type="string">
            <text:p>https://one-draw.jp/ijinden/cardlist/002/card/02_031.png</text:p>
          </table:table-cell>
          <table:table-cell table:formula="of:=CONCATENATE([$JSON.$A$1];[.$C164];[$JSON.$B$1];[.$E164];[$JSON.$C$1];[.$F164];[$JSON.$D$1];IF(ISNA([.$S164]);&quot;null&quot;;&quot;&quot;&quot;&quot;&amp;[.$S164]&amp;&quot;&quot;&quot;&quot;);[$JSON.$E$1];[.$U164];[$JSON.$F$1];IF(ISNA([.$V164]);&quot;null&quot;;&quot;&quot;&quot;&quot;&amp;[.$V164]&amp;&quot;&quot;&quot;&quot;);[$JSON.$G$1];[.$X164];[$JSON.$H$1];[.$H164];[$JSON.$I$1];[.J164];[$JSON.$J$1];[.$L164];[$JSON.$K$1];[.$O164];[$JSON.$L$1];[.$N164];[$JSON.$M$1];[.$R164];[$JSON.$N$1];[.$T164];[$JSON.$O$1];[.$W164];[$JSON.$P$1];[.$A164];[$JSON.$Q$1];[.$B164];[$JSON.$R$1])" office:value-type="string" office:string-value="{&quot;id&quot;:&quot;2-31&quot;,&quot;name&quot;:&quot;東洲斎写楽&quot;,&quot;kana&quot;:&quot;とうしゅうさいしゃらく&quot;,&quot;traitText&quot;:&quot;美術&quot;,&quot;ruleText&quot;:&quot;破壊されたとき、自分の手札か自分の墓地のレベル7以下の「美術」カード1つを指定して発動できる。そのカードを戦場に置く。&quot;,&quot;legacyText&quot;:&quot;1ドローする&quot;,&quot;imageUrl&quot;:&quot;https://one-draw.jp/ijinden/cardlist/002/card/02_031.png&quot;,&quot;expansion&quot;:25,&quot;rarity&quot;:1,&quot;type&quot;:1,&quot;level&quot;:8,&quot;color&quot;:4,&quot;term&quot;:0,&quot;trait&quot;:2,&quot;legacy&quot;:4,&quot;orderTable&quot;:163,&quot;orderDeck&quot;:223}," calcext:value-type="string">
            <text:p>{"id":"2-31","name":"東洲斎写楽","kana":"とうしゅうさいしゃらく","traitText":"美術","ruleText":"破壊されたとき、自分の手札か自分の墓地のレベル7以下の「美術」カード1つを指定して発動できる。そのカードを戦場に置く。","legacyText":"1ドローする","imageUrl":"https://one-draw.jp/ijinden/cardlist/002/card/02_031.png","expansion":25,"rarity":1,"type":1,"level":8,"color":4,"term":0,"trait":2,"legacy":4,"orderTable":163,"orderDeck":223},</text:p>
          </table:table-cell>
          <table:table-cell table:number-columns-repeated="16347"/>
        </table:table-row>
        <table:table-row table:style-name="ro2">
          <table:table-cell office:value-type="float" office:value="164" calcext:value-type="float">
            <text:p>164</text:p>
          </table:table-cell>
          <table:table-cell office:value-type="float" office:value="134" calcext:value-type="float">
            <text:p>134</text:p>
          </table:table-cell>
          <table:table-cell office:value-type="string" calcext:value-type="string">
            <text:p>2-32</text:p>
          </table:table-cell>
          <table:table-cell office:value-type="float" office:value="32" calcext:value-type="float">
            <text:p>32</text:p>
          </table:table-cell>
          <table:table-cell office:value-type="string" calcext:value-type="string">
            <text:p>曹操</text:p>
          </table:table-cell>
          <table:table-cell office:value-type="string" calcext:value-type="string">
            <text:p>そうそう</text:p>
          </table:table-cell>
          <table:table-cell office:value-type="string" calcext:value-type="string">
            <text:p>第２弾ブースターパック</text:p>
          </table:table-cell>
          <table:table-cell table:formula="of:=VLOOKUP([.G165];[$収録番号.$A$1:$収録番号.$B$9];2;0)" office:value-type="float" office:value="25" calcext:value-type="float">
            <text:p>25</text:p>
          </table:table-cell>
          <table:table-cell office:value-type="string" calcext:value-type="string">
            <text:p>R</text:p>
          </table:table-cell>
          <table:table-cell table:formula="of:=VLOOKUP([.I165];[$レアリティ番号.$A$1:$レアリティ番号.$B$4];2;0)" office:value-type="float" office:value="2" calcext:value-type="float">
            <text:p>2</text:p>
          </table:table-cell>
          <table:table-cell office:value-type="string" calcext:value-type="string">
            <text:p>イジン</text:p>
          </table:table-cell>
          <table:table-cell table:formula="of:=VLOOKUP([.K165];[$種類番号.$A$1:$種類番号.$B$4];2;0)" office:value-type="float" office:value="1" calcext:value-type="float">
            <text:p>1</text:p>
          </table:table-cell>
          <table:table-cell office:value-type="string" calcext:value-type="string">
            <text:p>黄</text:p>
          </table:table-cell>
          <table:table-cell table:formula="of:=VLOOKUP([.M165];[$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徴募</text:p>
          </table:table-cell>
          <table:table-cell table:formula="of:=IFERROR(VLOOKUP([.$Q165];[$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S165];[$特性番号.$A$1:$特性番号.$B$8];2;0);0)" office:value-type="float" office:value="0" calcext:value-type="float">
            <text:p>0</text:p>
          </table:table-cell>
          <table:table-cell office:value-type="string" calcext:value-type="string">
            <text:p>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text:p>
          </table:table-cell>
          <table:table-cell table:style-name="ce8" table:formula="of:=NA()" office:value-type="string" office:string-value="" calcext:value-type="error">
            <text:p>#N/A</text:p>
          </table:table-cell>
          <table:table-cell table:formula="of:=IFERROR(VLOOKUP([.$V165];[$遺業能力番号.$A$1:$遺業能力番号.$B$9];2;0);0)" office:value-type="float" office:value="0" calcext:value-type="float">
            <text:p>0</text:p>
          </table:table-cell>
          <table:table-cell office:value-type="string" calcext:value-type="string">
            <text:p>https://one-draw.jp/ijinden/cardlist/002/card/02_032.png</text:p>
          </table:table-cell>
          <table:table-cell table:formula="of:=CONCATENATE([$JSON.$A$1];[.$C165];[$JSON.$B$1];[.$E165];[$JSON.$C$1];[.$F165];[$JSON.$D$1];IF(ISNA([.$S165]);&quot;null&quot;;&quot;&quot;&quot;&quot;&amp;[.$S165]&amp;&quot;&quot;&quot;&quot;);[$JSON.$E$1];[.$U165];[$JSON.$F$1];IF(ISNA([.$V165]);&quot;null&quot;;&quot;&quot;&quot;&quot;&amp;[.$V165]&amp;&quot;&quot;&quot;&quot;);[$JSON.$G$1];[.$X165];[$JSON.$H$1];[.$H165];[$JSON.$I$1];[.J165];[$JSON.$J$1];[.$L165];[$JSON.$K$1];[.$O165];[$JSON.$L$1];[.$N165];[$JSON.$M$1];[.$R165];[$JSON.$N$1];[.$T165];[$JSON.$O$1];[.$W165];[$JSON.$P$1];[.$A165];[$JSON.$Q$1];[.$B165];[$JSON.$R$1])" office:value-type="string" office:string-value="{&quot;id&quot;:&quot;2-32&quot;,&quot;name&quot;:&quot;曹操&quot;,&quot;kana&quot;:&quot;そうそう&quot;,&quot;traitText&quot;:null,&quot;ruleText&quot;:&quot;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quot;,&quot;legacyText&quot;:null,&quot;imageUrl&quot;:&quot;https://one-draw.jp/ijinden/cardlist/002/card/02_032.png&quot;,&quot;expansion&quot;:25,&quot;rarity&quot;:2,&quot;type&quot;:1,&quot;level&quot;:4,&quot;color&quot;:8,&quot;term&quot;:8,&quot;trait&quot;:0,&quot;legacy&quot;:0,&quot;orderTable&quot;:164,&quot;orderDeck&quot;:134}," calcext:value-type="string">
            <text:p>{"id":"2-32","name":"曹操","kana":"そうそう","traitText":null,"ruleText":"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legacyText":null,"imageUrl":"https://one-draw.jp/ijinden/cardlist/002/card/02_032.png","expansion":25,"rarity":2,"type":1,"level":4,"color":8,"term":8,"trait":0,"legacy":0,"orderTable":164,"orderDeck":134},</text:p>
          </table:table-cell>
          <table:table-cell table:number-columns-repeated="16347"/>
        </table:table-row>
        <table:table-row table:style-name="ro2">
          <table:table-cell office:value-type="float" office:value="165" calcext:value-type="float">
            <text:p>165</text:p>
          </table:table-cell>
          <table:table-cell office:value-type="float" office:value="54" calcext:value-type="float">
            <text:p>54</text:p>
          </table:table-cell>
          <table:table-cell office:value-type="string" calcext:value-type="string">
            <text:p>2-33</text:p>
          </table:table-cell>
          <table:table-cell office:value-type="float" office:value="33" calcext:value-type="float">
            <text:p>33</text:p>
          </table:table-cell>
          <table:table-cell office:value-type="string" calcext:value-type="string">
            <text:p>張角</text:p>
          </table:table-cell>
          <table:table-cell office:value-type="string" calcext:value-type="string">
            <text:p>ちょうかく</text:p>
          </table:table-cell>
          <table:table-cell office:value-type="string" calcext:value-type="string">
            <text:p>第２弾ブースターパック</text:p>
          </table:table-cell>
          <table:table-cell table:formula="of:=VLOOKUP([.G166];[$収録番号.$A$1:$収録番号.$B$9];2;0)" office:value-type="float" office:value="25" calcext:value-type="float">
            <text:p>25</text:p>
          </table:table-cell>
          <table:table-cell office:value-type="string" calcext:value-type="string">
            <text:p>N</text:p>
          </table:table-cell>
          <table:table-cell table:formula="of:=VLOOKUP([.I166];[$レアリティ番号.$A$1:$レアリティ番号.$B$4];2;0)" office:value-type="float" office:value="1" calcext:value-type="float">
            <text:p>1</text:p>
          </table:table-cell>
          <table:table-cell office:value-type="string" calcext:value-type="string">
            <text:p>イジン</text:p>
          </table:table-cell>
          <table:table-cell table:formula="of:=VLOOKUP([.K166];[$種類番号.$A$1:$種類番号.$B$4];2;0)" office:value-type="float" office:value="1" calcext:value-type="float">
            <text:p>1</text:p>
          </table:table-cell>
          <table:table-cell office:value-type="string" calcext:value-type="string">
            <text:p>黄</text:p>
          </table:table-cell>
          <table:table-cell table:formula="of:=VLOOKUP([.M166];[$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66];[$特性番号.$A$1:$特性番号.$B$8];2;0);0)" office:value-type="float" office:value="0" calcext:value-type="float">
            <text:p>0</text:p>
          </table:table-cell>
          <table:table-cell office:value-type="string" calcext:value-type="string">
            <text:p>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text:p>
          </table:table-cell>
          <table:table-cell table:style-name="ce8" office:value-type="string" calcext:value-type="string">
            <text:p>反魂</text:p>
          </table:table-cell>
          <table:table-cell table:formula="of:=IFERROR(VLOOKUP([.$V166];[$遺業能力番号.$A$1:$遺業能力番号.$B$9];2;0);0)" office:value-type="float" office:value="6" calcext:value-type="float">
            <text:p>6</text:p>
          </table:table-cell>
          <table:table-cell office:value-type="string" calcext:value-type="string">
            <text:p>https://one-draw.jp/ijinden/cardlist/002/card/02_033.png</text:p>
          </table:table-cell>
          <table:table-cell table:formula="of:=CONCATENATE([$JSON.$A$1];[.$C166];[$JSON.$B$1];[.$E166];[$JSON.$C$1];[.$F166];[$JSON.$D$1];IF(ISNA([.$S166]);&quot;null&quot;;&quot;&quot;&quot;&quot;&amp;[.$S166]&amp;&quot;&quot;&quot;&quot;);[$JSON.$E$1];[.$U166];[$JSON.$F$1];IF(ISNA([.$V166]);&quot;null&quot;;&quot;&quot;&quot;&quot;&amp;[.$V166]&amp;&quot;&quot;&quot;&quot;);[$JSON.$G$1];[.$X166];[$JSON.$H$1];[.$H166];[$JSON.$I$1];[.J166];[$JSON.$J$1];[.$L166];[$JSON.$K$1];[.$O166];[$JSON.$L$1];[.$N166];[$JSON.$M$1];[.$R166];[$JSON.$N$1];[.$T166];[$JSON.$O$1];[.$W166];[$JSON.$P$1];[.$A166];[$JSON.$Q$1];[.$B166];[$JSON.$R$1])" office:value-type="string" office:string-value="{&quot;id&quot;:&quot;2-33&quot;,&quot;name&quot;:&quot;張角&quot;,&quot;kana&quot;:&quot;ちょうかく&quot;,&quot;traitText&quot;:null,&quot;ruleText&quot;:&quot;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quot;,&quot;legacyText&quot;:&quot;反魂&quot;,&quot;imageUrl&quot;:&quot;https://one-draw.jp/ijinden/cardlist/002/card/02_033.png&quot;,&quot;expansion&quot;:25,&quot;rarity&quot;:1,&quot;type&quot;:1,&quot;level&quot;:2,&quot;color&quot;:8,&quot;term&quot;:0,&quot;trait&quot;:0,&quot;legacy&quot;:6,&quot;orderTable&quot;:165,&quot;orderDeck&quot;:54}," calcext:value-type="string">
            <text:p>{"id":"2-33","name":"張角","kana":"ちょうかく","traitText":null,"ruleText":"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legacyText":"反魂","imageUrl":"https://one-draw.jp/ijinden/cardlist/002/card/02_033.png","expansion":25,"rarity":1,"type":1,"level":2,"color":8,"term":0,"trait":0,"legacy":6,"orderTable":165,"orderDeck":54},</text:p>
          </table:table-cell>
          <table:table-cell table:number-columns-repeated="16347"/>
        </table:table-row>
        <table:table-row table:style-name="ro2">
          <table:table-cell office:value-type="float" office:value="166" calcext:value-type="float">
            <text:p>166</text:p>
          </table:table-cell>
          <table:table-cell office:value-type="float" office:value="94" calcext:value-type="float">
            <text:p>94</text:p>
          </table:table-cell>
          <table:table-cell office:value-type="string" calcext:value-type="string">
            <text:p>2-34</text:p>
          </table:table-cell>
          <table:table-cell office:value-type="float" office:value="34" calcext:value-type="float">
            <text:p>34</text:p>
          </table:table-cell>
          <table:table-cell office:value-type="string" calcext:value-type="string">
            <text:p>劉備</text:p>
          </table:table-cell>
          <table:table-cell office:value-type="string" calcext:value-type="string">
            <text:p>りゅうび</text:p>
          </table:table-cell>
          <table:table-cell office:value-type="string" calcext:value-type="string">
            <text:p>第２弾ブースターパック</text:p>
          </table:table-cell>
          <table:table-cell table:formula="of:=VLOOKUP([.G167];[$収録番号.$A$1:$収録番号.$B$9];2;0)" office:value-type="float" office:value="25" calcext:value-type="float">
            <text:p>25</text:p>
          </table:table-cell>
          <table:table-cell office:value-type="string" calcext:value-type="string">
            <text:p>N</text:p>
          </table:table-cell>
          <table:table-cell table:formula="of:=VLOOKUP([.I167];[$レアリティ番号.$A$1:$レアリティ番号.$B$4];2;0)" office:value-type="float" office:value="1" calcext:value-type="float">
            <text:p>1</text:p>
          </table:table-cell>
          <table:table-cell office:value-type="string" calcext:value-type="string">
            <text:p>イジン</text:p>
          </table:table-cell>
          <table:table-cell table:formula="of:=VLOOKUP([.K167];[$種類番号.$A$1:$種類番号.$B$4];2;0)" office:value-type="float" office:value="1" calcext:value-type="float">
            <text:p>1</text:p>
          </table:table-cell>
          <table:table-cell office:value-type="string" calcext:value-type="string">
            <text:p>黄</text:p>
          </table:table-cell>
          <table:table-cell table:formula="of:=VLOOKUP([.M167];[$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67];[$特性番号.$A$1:$特性番号.$B$8];2;0);0)" office:value-type="float" office:value="0" calcext:value-type="float">
            <text:p>0</text:p>
          </table:table-cell>
          <table:table-cell office:value-type="string" calcext:value-type="string">
            <text:p>自分の戦場の緑のイジンが起きたとき、1ドローする。¶自分のイジン召喚に際し、自分の戦場のイジンを3体まで寝かせてもよい。寝かせた1体につき、手札のイジンは「レベル-1」される。</text:p>
          </table:table-cell>
          <table:table-cell table:style-name="ce8" office:value-type="string" calcext:value-type="string">
            <text:p>1ドローする</text:p>
          </table:table-cell>
          <table:table-cell table:formula="of:=IFERROR(VLOOKUP([.$V167];[$遺業能力番号.$A$1:$遺業能力番号.$B$9];2;0);0)" office:value-type="float" office:value="4" calcext:value-type="float">
            <text:p>4</text:p>
          </table:table-cell>
          <table:table-cell office:value-type="string" calcext:value-type="string">
            <text:p>https://one-draw.jp/ijinden/cardlist/002/card/02_034.png</text:p>
          </table:table-cell>
          <table:table-cell table:formula="of:=CONCATENATE([$JSON.$A$1];[.$C167];[$JSON.$B$1];[.$E167];[$JSON.$C$1];[.$F167];[$JSON.$D$1];IF(ISNA([.$S167]);&quot;null&quot;;&quot;&quot;&quot;&quot;&amp;[.$S167]&amp;&quot;&quot;&quot;&quot;);[$JSON.$E$1];[.$U167];[$JSON.$F$1];IF(ISNA([.$V167]);&quot;null&quot;;&quot;&quot;&quot;&quot;&amp;[.$V167]&amp;&quot;&quot;&quot;&quot;);[$JSON.$G$1];[.$X167];[$JSON.$H$1];[.$H167];[$JSON.$I$1];[.J167];[$JSON.$J$1];[.$L167];[$JSON.$K$1];[.$O167];[$JSON.$L$1];[.$N167];[$JSON.$M$1];[.$R167];[$JSON.$N$1];[.$T167];[$JSON.$O$1];[.$W167];[$JSON.$P$1];[.$A167];[$JSON.$Q$1];[.$B167];[$JSON.$R$1])" office:value-type="string" office:string-value="{&quot;id&quot;:&quot;2-34&quot;,&quot;name&quot;:&quot;劉備&quot;,&quot;kana&quot;:&quot;りゅうび&quot;,&quot;traitText&quot;:null,&quot;ruleText&quot;:&quot;自分の戦場の緑のイジンが起きたとき、1ドローする。¶自分のイジン召喚に際し、自分の戦場のイジンを3体まで寝かせてもよい。寝かせた1体につき、手札のイジンは「レベル-1」される。&quot;,&quot;legacyText&quot;:&quot;1ドローする&quot;,&quot;imageUrl&quot;:&quot;https://one-draw.jp/ijinden/cardlist/002/card/02_034.png&quot;,&quot;expansion&quot;:25,&quot;rarity&quot;:1,&quot;type&quot;:1,&quot;level&quot;:3,&quot;color&quot;:8,&quot;term&quot;:0,&quot;trait&quot;:0,&quot;legacy&quot;:4,&quot;orderTable&quot;:166,&quot;orderDeck&quot;:94}," calcext:value-type="string">
            <text:p>{"id":"2-34","name":"劉備","kana":"りゅうび","traitText":null,"ruleText":"自分の戦場の緑のイジンが起きたとき、1ドローする。¶自分のイジン召喚に際し、自分の戦場のイジンを3体まで寝かせてもよい。寝かせた1体につき、手札のイジンは「レベル-1」される。","legacyText":"1ドローする","imageUrl":"https://one-draw.jp/ijinden/cardlist/002/card/02_034.png","expansion":25,"rarity":1,"type":1,"level":3,"color":8,"term":0,"trait":0,"legacy":4,"orderTable":166,"orderDeck":94},</text:p>
          </table:table-cell>
          <table:table-cell table:number-columns-repeated="16347"/>
        </table:table-row>
        <table:table-row table:style-name="ro2">
          <table:table-cell office:value-type="float" office:value="167" calcext:value-type="float">
            <text:p>167</text:p>
          </table:table-cell>
          <table:table-cell office:value-type="float" office:value="172" calcext:value-type="float">
            <text:p>172</text:p>
          </table:table-cell>
          <table:table-cell office:value-type="string" calcext:value-type="string">
            <text:p>2-35</text:p>
          </table:table-cell>
          <table:table-cell office:value-type="float" office:value="35" calcext:value-type="float">
            <text:p>35</text:p>
          </table:table-cell>
          <table:table-cell office:value-type="string" calcext:value-type="string">
            <text:p>司馬懿</text:p>
          </table:table-cell>
          <table:table-cell office:value-type="string" calcext:value-type="string">
            <text:p>しばい</text:p>
          </table:table-cell>
          <table:table-cell office:value-type="string" calcext:value-type="string">
            <text:p>第２弾ブースターパック</text:p>
          </table:table-cell>
          <table:table-cell table:formula="of:=VLOOKUP([.G168];[$収録番号.$A$1:$収録番号.$B$9];2;0)" office:value-type="float" office:value="25" calcext:value-type="float">
            <text:p>25</text:p>
          </table:table-cell>
          <table:table-cell office:value-type="string" calcext:value-type="string">
            <text:p>N</text:p>
          </table:table-cell>
          <table:table-cell table:formula="of:=VLOOKUP([.I168];[$レアリティ番号.$A$1:$レアリティ番号.$B$4];2;0)" office:value-type="float" office:value="1" calcext:value-type="float">
            <text:p>1</text:p>
          </table:table-cell>
          <table:table-cell office:value-type="string" calcext:value-type="string">
            <text:p>イジン</text:p>
          </table:table-cell>
          <table:table-cell table:formula="of:=VLOOKUP([.K168];[$種類番号.$A$1:$種類番号.$B$4];2;0)" office:value-type="float" office:value="1" calcext:value-type="float">
            <text:p>1</text:p>
          </table:table-cell>
          <table:table-cell office:value-type="string" calcext:value-type="string">
            <text:p>黄</text:p>
          </table:table-cell>
          <table:table-cell table:formula="of:=VLOOKUP([.M168];[$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68];[$特性番号.$A$1:$特性番号.$B$8];2;0);0)" office:value-type="float" office:value="0" calcext:value-type="float">
            <text:p>0</text:p>
          </table:table-cell>
          <table:table-cell office:value-type="string" calcext:value-type="string">
            <text:p>自分の墓地にある「徴募」が発動したとき、自分の山札の上から1枚をガーディアンにして戦場に置く。¶ブロック+2000</text:p>
          </table:table-cell>
          <table:table-cell table:style-name="ce8" office:value-type="string" calcext:value-type="string">
            <text:p>1ドローする</text:p>
          </table:table-cell>
          <table:table-cell table:formula="of:=IFERROR(VLOOKUP([.$V168];[$遺業能力番号.$A$1:$遺業能力番号.$B$9];2;0);0)" office:value-type="float" office:value="4" calcext:value-type="float">
            <text:p>4</text:p>
          </table:table-cell>
          <table:table-cell office:value-type="string" calcext:value-type="string">
            <text:p>https://one-draw.jp/ijinden/cardlist/002/card/02_035.png</text:p>
          </table:table-cell>
          <table:table-cell table:formula="of:=CONCATENATE([$JSON.$A$1];[.$C168];[$JSON.$B$1];[.$E168];[$JSON.$C$1];[.$F168];[$JSON.$D$1];IF(ISNA([.$S168]);&quot;null&quot;;&quot;&quot;&quot;&quot;&amp;[.$S168]&amp;&quot;&quot;&quot;&quot;);[$JSON.$E$1];[.$U168];[$JSON.$F$1];IF(ISNA([.$V168]);&quot;null&quot;;&quot;&quot;&quot;&quot;&amp;[.$V168]&amp;&quot;&quot;&quot;&quot;);[$JSON.$G$1];[.$X168];[$JSON.$H$1];[.$H168];[$JSON.$I$1];[.J168];[$JSON.$J$1];[.$L168];[$JSON.$K$1];[.$O168];[$JSON.$L$1];[.$N168];[$JSON.$M$1];[.$R168];[$JSON.$N$1];[.$T168];[$JSON.$O$1];[.$W168];[$JSON.$P$1];[.$A168];[$JSON.$Q$1];[.$B168];[$JSON.$R$1])" office:value-type="string" office:string-value="{&quot;id&quot;:&quot;2-35&quot;,&quot;name&quot;:&quot;司馬懿&quot;,&quot;kana&quot;:&quot;しばい&quot;,&quot;traitText&quot;:null,&quot;ruleText&quot;:&quot;自分の墓地にある「徴募」が発動したとき、自分の山札の上から1枚をガーディアンにして戦場に置く。¶ブロック+2000&quot;,&quot;legacyText&quot;:&quot;1ドローする&quot;,&quot;imageUrl&quot;:&quot;https://one-draw.jp/ijinden/cardlist/002/card/02_035.png&quot;,&quot;expansion&quot;:25,&quot;rarity&quot;:1,&quot;type&quot;:1,&quot;level&quot;:5,&quot;color&quot;:8,&quot;term&quot;:0,&quot;trait&quot;:0,&quot;legacy&quot;:4,&quot;orderTable&quot;:167,&quot;orderDeck&quot;:172}," calcext:value-type="string">
            <text:p>{"id":"2-35","name":"司馬懿","kana":"しばい","traitText":null,"ruleText":"自分の墓地にある「徴募」が発動したとき、自分の山札の上から1枚をガーディアンにして戦場に置く。¶ブロック+2000","legacyText":"1ドローする","imageUrl":"https://one-draw.jp/ijinden/cardlist/002/card/02_035.png","expansion":25,"rarity":1,"type":1,"level":5,"color":8,"term":0,"trait":0,"legacy":4,"orderTable":167,"orderDeck":172},</text:p>
          </table:table-cell>
          <table:table-cell table:number-columns-repeated="16347"/>
        </table:table-row>
        <table:table-row table:style-name="ro2">
          <table:table-cell office:value-type="float" office:value="168" calcext:value-type="float">
            <text:p>168</text:p>
          </table:table-cell>
          <table:table-cell office:value-type="float" office:value="215" calcext:value-type="float">
            <text:p>215</text:p>
          </table:table-cell>
          <table:table-cell office:value-type="string" calcext:value-type="string">
            <text:p>2-36</text:p>
          </table:table-cell>
          <table:table-cell office:value-type="float" office:value="36" calcext:value-type="float">
            <text:p>36</text:p>
          </table:table-cell>
          <table:table-cell office:value-type="string" calcext:value-type="string">
            <text:p>足利義政</text:p>
          </table:table-cell>
          <table:table-cell office:value-type="string" calcext:value-type="string">
            <text:p>あしかがよしまさ</text:p>
          </table:table-cell>
          <table:table-cell office:value-type="string" calcext:value-type="string">
            <text:p>第２弾ブースターパック</text:p>
          </table:table-cell>
          <table:table-cell table:formula="of:=VLOOKUP([.G169];[$収録番号.$A$1:$収録番号.$B$9];2;0)" office:value-type="float" office:value="25" calcext:value-type="float">
            <text:p>25</text:p>
          </table:table-cell>
          <table:table-cell office:value-type="string" calcext:value-type="string">
            <text:p>N</text:p>
          </table:table-cell>
          <table:table-cell table:formula="of:=VLOOKUP([.I169];[$レアリティ番号.$A$1:$レアリティ番号.$B$4];2;0)" office:value-type="float" office:value="1" calcext:value-type="float">
            <text:p>1</text:p>
          </table:table-cell>
          <table:table-cell office:value-type="string" calcext:value-type="string">
            <text:p>イジン</text:p>
          </table:table-cell>
          <table:table-cell table:formula="of:=VLOOKUP([.K169];[$種類番号.$A$1:$種類番号.$B$4];2;0)" office:value-type="float" office:value="1" calcext:value-type="float">
            <text:p>1</text:p>
          </table:table-cell>
          <table:table-cell office:value-type="string" calcext:value-type="string">
            <text:p>黄</text:p>
          </table:table-cell>
          <table:table-cell table:formula="of:=VLOOKUP([.M169];[$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69];[$特性番号.$A$1:$特性番号.$B$8];2;0);0)" office:value-type="float" office:value="0" calcext:value-type="float">
            <text:p>0</text:p>
          </table:table-cell>
          <table:table-cell office:value-type="string" calcext:value-type="string">
            <text:p>赤のイジンが自分の戦場に置かれたときに発動できる。2ドローするか、イジン召喚権+2する。</text:p>
          </table:table-cell>
          <table:table-cell table:style-name="ce8" office:value-type="string" calcext:value-type="string">
            <text:p>魔力化</text:p>
          </table:table-cell>
          <table:table-cell table:formula="of:=IFERROR(VLOOKUP([.$V169];[$遺業能力番号.$A$1:$遺業能力番号.$B$9];2;0);0)" office:value-type="float" office:value="1" calcext:value-type="float">
            <text:p>1</text:p>
          </table:table-cell>
          <table:table-cell office:value-type="string" calcext:value-type="string">
            <text:p>https://one-draw.jp/ijinden/cardlist/002/card/02_036.png</text:p>
          </table:table-cell>
          <table:table-cell table:formula="of:=CONCATENATE([$JSON.$A$1];[.$C169];[$JSON.$B$1];[.$E169];[$JSON.$C$1];[.$F169];[$JSON.$D$1];IF(ISNA([.$S169]);&quot;null&quot;;&quot;&quot;&quot;&quot;&amp;[.$S169]&amp;&quot;&quot;&quot;&quot;);[$JSON.$E$1];[.$U169];[$JSON.$F$1];IF(ISNA([.$V169]);&quot;null&quot;;&quot;&quot;&quot;&quot;&amp;[.$V169]&amp;&quot;&quot;&quot;&quot;);[$JSON.$G$1];[.$X169];[$JSON.$H$1];[.$H169];[$JSON.$I$1];[.J169];[$JSON.$J$1];[.$L169];[$JSON.$K$1];[.$O169];[$JSON.$L$1];[.$N169];[$JSON.$M$1];[.$R169];[$JSON.$N$1];[.$T169];[$JSON.$O$1];[.$W169];[$JSON.$P$1];[.$A169];[$JSON.$Q$1];[.$B169];[$JSON.$R$1])" office:value-type="string" office:string-value="{&quot;id&quot;:&quot;2-36&quot;,&quot;name&quot;:&quot;足利義政&quot;,&quot;kana&quot;:&quot;あしかがよしまさ&quot;,&quot;traitText&quot;:null,&quot;ruleText&quot;:&quot;赤のイジンが自分の戦場に置かれたときに発動できる。2ドローするか、イジン召喚権+2する。&quot;,&quot;legacyText&quot;:&quot;魔力化&quot;,&quot;imageUrl&quot;:&quot;https://one-draw.jp/ijinden/cardlist/002/card/02_036.png&quot;,&quot;expansion&quot;:25,&quot;rarity&quot;:1,&quot;type&quot;:1,&quot;level&quot;:7,&quot;color&quot;:8,&quot;term&quot;:0,&quot;trait&quot;:0,&quot;legacy&quot;:1,&quot;orderTable&quot;:168,&quot;orderDeck&quot;:215}," calcext:value-type="string">
            <text:p>{"id":"2-36","name":"足利義政","kana":"あしかがよしまさ","traitText":null,"ruleText":"赤のイジンが自分の戦場に置かれたときに発動できる。2ドローするか、イジン召喚権+2する。","legacyText":"魔力化","imageUrl":"https://one-draw.jp/ijinden/cardlist/002/card/02_036.png","expansion":25,"rarity":1,"type":1,"level":7,"color":8,"term":0,"trait":0,"legacy":1,"orderTable":168,"orderDeck":215},</text:p>
          </table:table-cell>
          <table:table-cell table:number-columns-repeated="16347"/>
        </table:table-row>
        <table:table-row table:style-name="ro2">
          <table:table-cell office:value-type="float" office:value="169" calcext:value-type="float">
            <text:p>169</text:p>
          </table:table-cell>
          <table:table-cell office:value-type="float" office:value="232" calcext:value-type="float">
            <text:p>232</text:p>
          </table:table-cell>
          <table:table-cell office:value-type="string" calcext:value-type="string">
            <text:p>2-37</text:p>
          </table:table-cell>
          <table:table-cell office:value-type="float" office:value="37" calcext:value-type="float">
            <text:p>37</text:p>
          </table:table-cell>
          <table:table-cell office:value-type="string" calcext:value-type="string">
            <text:p>姜維</text:p>
          </table:table-cell>
          <table:table-cell office:value-type="string" calcext:value-type="string">
            <text:p>きょうい</text:p>
          </table:table-cell>
          <table:table-cell office:value-type="string" calcext:value-type="string">
            <text:p>第２弾ブースターパック</text:p>
          </table:table-cell>
          <table:table-cell table:formula="of:=VLOOKUP([.G170];[$収録番号.$A$1:$収録番号.$B$9];2;0)" office:value-type="float" office:value="25" calcext:value-type="float">
            <text:p>25</text:p>
          </table:table-cell>
          <table:table-cell office:value-type="string" calcext:value-type="string">
            <text:p>N</text:p>
          </table:table-cell>
          <table:table-cell table:formula="of:=VLOOKUP([.I170];[$レアリティ番号.$A$1:$レアリティ番号.$B$4];2;0)" office:value-type="float" office:value="1" calcext:value-type="float">
            <text:p>1</text:p>
          </table:table-cell>
          <table:table-cell office:value-type="string" calcext:value-type="string">
            <text:p>イジン</text:p>
          </table:table-cell>
          <table:table-cell table:formula="of:=VLOOKUP([.K170];[$種類番号.$A$1:$種類番号.$B$4];2;0)" office:value-type="float" office:value="1" calcext:value-type="float">
            <text:p>1</text:p>
          </table:table-cell>
          <table:table-cell office:value-type="string" calcext:value-type="string">
            <text:p>黄</text:p>
          </table:table-cell>
          <table:table-cell table:formula="of:=VLOOKUP([.M170];[$色番号.$A$1:$色番号.$B$10];2;0)" office:value-type="float" office:value="8" calcext:value-type="float">
            <text:p>8</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0];[$特性番号.$A$1:$特性番号.$B$8];2;0);0)" office:value-type="float" office:value="0" calcext:value-type="float">
            <text:p>0</text:p>
          </table:table-cell>
          <table:table-cell office:value-type="string" calcext:value-type="string">
            <text:p>これのイジン召喚に際し、これのレベルは自分の墓地の「反魂」を持つカードの最も高いレベルと同じだけ下がる。¶これが戦場にいる間、自分の戦場の他の黄のイジンは「即応 ウォッチャー パワー+3000」を得る。</text:p>
          </table:table-cell>
          <table:table-cell table:style-name="ce8" table:formula="of:=NA()" office:value-type="string" office:string-value="" calcext:value-type="error">
            <text:p>#N/A</text:p>
          </table:table-cell>
          <table:table-cell table:formula="of:=IFERROR(VLOOKUP([.$V170];[$遺業能力番号.$A$1:$遺業能力番号.$B$9];2;0);0)" office:value-type="float" office:value="0" calcext:value-type="float">
            <text:p>0</text:p>
          </table:table-cell>
          <table:table-cell office:value-type="string" calcext:value-type="string">
            <text:p>https://one-draw.jp/ijinden/cardlist/002/card/02_037.png</text:p>
          </table:table-cell>
          <table:table-cell table:formula="of:=CONCATENATE([$JSON.$A$1];[.$C170];[$JSON.$B$1];[.$E170];[$JSON.$C$1];[.$F170];[$JSON.$D$1];IF(ISNA([.$S170]);&quot;null&quot;;&quot;&quot;&quot;&quot;&amp;[.$S170]&amp;&quot;&quot;&quot;&quot;);[$JSON.$E$1];[.$U170];[$JSON.$F$1];IF(ISNA([.$V170]);&quot;null&quot;;&quot;&quot;&quot;&quot;&amp;[.$V170]&amp;&quot;&quot;&quot;&quot;);[$JSON.$G$1];[.$X170];[$JSON.$H$1];[.$H170];[$JSON.$I$1];[.J170];[$JSON.$J$1];[.$L170];[$JSON.$K$1];[.$O170];[$JSON.$L$1];[.$N170];[$JSON.$M$1];[.$R170];[$JSON.$N$1];[.$T170];[$JSON.$O$1];[.$W170];[$JSON.$P$1];[.$A170];[$JSON.$Q$1];[.$B170];[$JSON.$R$1])" office:value-type="string" office:string-value="{&quot;id&quot;:&quot;2-37&quot;,&quot;name&quot;:&quot;姜維&quot;,&quot;kana&quot;:&quot;きょうい&quot;,&quot;traitText&quot;:null,&quot;ruleText&quot;:&quot;これのイジン召喚に際し、これのレベルは自分の墓地の「反魂」を持つカードの最も高いレベルと同じだけ下がる。¶これが戦場にいる間、自分の戦場の他の黄のイジンは「即応 ウォッチャー パワー+3000」を得る。&quot;,&quot;legacyText&quot;:null,&quot;imageUrl&quot;:&quot;https://one-draw.jp/ijinden/cardlist/002/card/02_037.png&quot;,&quot;expansion&quot;:25,&quot;rarity&quot;:1,&quot;type&quot;:1,&quot;level&quot;:9,&quot;color&quot;:8,&quot;term&quot;:0,&quot;trait&quot;:0,&quot;legacy&quot;:0,&quot;orderTable&quot;:169,&quot;orderDeck&quot;:232}," calcext:value-type="string">
            <text:p>{"id":"2-37","name":"姜維","kana":"きょうい","traitText":null,"ruleText":"これのイジン召喚に際し、これのレベルは自分の墓地の「反魂」を持つカードの最も高いレベルと同じだけ下がる。¶これが戦場にいる間、自分の戦場の他の黄のイジンは「即応 ウォッチャー パワー+3000」を得る。","legacyText":null,"imageUrl":"https://one-draw.jp/ijinden/cardlist/002/card/02_037.png","expansion":25,"rarity":1,"type":1,"level":9,"color":8,"term":0,"trait":0,"legacy":0,"orderTable":169,"orderDeck":232},</text:p>
          </table:table-cell>
          <table:table-cell table:number-columns-repeated="16347"/>
        </table:table-row>
        <table:table-row table:style-name="ro2">
          <table:table-cell office:value-type="float" office:value="170" calcext:value-type="float">
            <text:p>170</text:p>
          </table:table-cell>
          <table:table-cell office:value-type="float" office:value="225" calcext:value-type="float">
            <text:p>225</text:p>
          </table:table-cell>
          <table:table-cell office:value-type="string" calcext:value-type="string">
            <text:p>2-38</text:p>
          </table:table-cell>
          <table:table-cell office:value-type="float" office:value="38" calcext:value-type="float">
            <text:p>38</text:p>
          </table:table-cell>
          <table:table-cell office:value-type="string" calcext:value-type="string">
            <text:p>裴松之</text:p>
          </table:table-cell>
          <table:table-cell office:value-type="string" calcext:value-type="string">
            <text:p>はいしょうし</text:p>
          </table:table-cell>
          <table:table-cell office:value-type="string" calcext:value-type="string">
            <text:p>第２弾ブースターパック</text:p>
          </table:table-cell>
          <table:table-cell table:formula="of:=VLOOKUP([.G171];[$収録番号.$A$1:$収録番号.$B$9];2;0)" office:value-type="float" office:value="25" calcext:value-type="float">
            <text:p>25</text:p>
          </table:table-cell>
          <table:table-cell office:value-type="string" calcext:value-type="string">
            <text:p>R</text:p>
          </table:table-cell>
          <table:table-cell table:formula="of:=VLOOKUP([.I171];[$レアリティ番号.$A$1:$レアリティ番号.$B$4];2;0)" office:value-type="float" office:value="2" calcext:value-type="float">
            <text:p>2</text:p>
          </table:table-cell>
          <table:table-cell office:value-type="string" calcext:value-type="string">
            <text:p>イジン</text:p>
          </table:table-cell>
          <table:table-cell table:formula="of:=VLOOKUP([.K171];[$種類番号.$A$1:$種類番号.$B$4];2;0)" office:value-type="float" office:value="1" calcext:value-type="float">
            <text:p>1</text:p>
          </table:table-cell>
          <table:table-cell office:value-type="string" calcext:value-type="string">
            <text:p>黄</text:p>
          </table:table-cell>
          <table:table-cell table:formula="of:=VLOOKUP([.M171];[$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執筆</text:p>
          </table:table-cell>
          <table:table-cell table:formula="of:=IFERROR(VLOOKUP([.$Q17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171];[$特性番号.$A$1:$特性番号.$B$8];2;0);0)" office:value-type="float" office:value="0" calcext:value-type="float">
            <text:p>0</text:p>
          </table:table-cell>
          <table:table-cell office:value-type="string" calcext:value-type="string">
            <text:p>これが戦場にいる間、他のカードの「執筆」は発動しない。¶執筆 - ハイケイが戦場に置かれたとき、戦場の「執筆」を持つカード1つにつき1体まで、相手の戦場のイジンを手札に戻す。</text:p>
          </table:table-cell>
          <table:table-cell table:style-name="ce8" office:value-type="string" calcext:value-type="string">
            <text:p>魔力化</text:p>
          </table:table-cell>
          <table:table-cell table:formula="of:=IFERROR(VLOOKUP([.$V171];[$遺業能力番号.$A$1:$遺業能力番号.$B$9];2;0);0)" office:value-type="float" office:value="1" calcext:value-type="float">
            <text:p>1</text:p>
          </table:table-cell>
          <table:table-cell office:value-type="string" calcext:value-type="string">
            <text:p>https://one-draw.jp/ijinden/cardlist/002/card/02_038.png</text:p>
          </table:table-cell>
          <table:table-cell table:formula="of:=CONCATENATE([$JSON.$A$1];[.$C171];[$JSON.$B$1];[.$E171];[$JSON.$C$1];[.$F171];[$JSON.$D$1];IF(ISNA([.$S171]);&quot;null&quot;;&quot;&quot;&quot;&quot;&amp;[.$S171]&amp;&quot;&quot;&quot;&quot;);[$JSON.$E$1];[.$U171];[$JSON.$F$1];IF(ISNA([.$V171]);&quot;null&quot;;&quot;&quot;&quot;&quot;&amp;[.$V171]&amp;&quot;&quot;&quot;&quot;);[$JSON.$G$1];[.$X171];[$JSON.$H$1];[.$H171];[$JSON.$I$1];[.J171];[$JSON.$J$1];[.$L171];[$JSON.$K$1];[.$O171];[$JSON.$L$1];[.$N171];[$JSON.$M$1];[.$R171];[$JSON.$N$1];[.$T171];[$JSON.$O$1];[.$W171];[$JSON.$P$1];[.$A171];[$JSON.$Q$1];[.$B171];[$JSON.$R$1])" office:value-type="string" office:string-value="{&quot;id&quot;:&quot;2-38&quot;,&quot;name&quot;:&quot;裴松之&quot;,&quot;kana&quot;:&quot;はいしょうし&quot;,&quot;traitText&quot;:null,&quot;ruleText&quot;:&quot;これが戦場にいる間、他のカードの「執筆」は発動しない。¶執筆 - ハイケイが戦場に置かれたとき、戦場の「執筆」を持つカード1つにつき1体まで、相手の戦場のイジンを手札に戻す。&quot;,&quot;legacyText&quot;:&quot;魔力化&quot;,&quot;imageUrl&quot;:&quot;https://one-draw.jp/ijinden/cardlist/002/card/02_038.png&quot;,&quot;expansion&quot;:25,&quot;rarity&quot;:2,&quot;type&quot;:1,&quot;level&quot;:8,&quot;color&quot;:8,&quot;term&quot;:2,&quot;trait&quot;:0,&quot;legacy&quot;:1,&quot;orderTable&quot;:170,&quot;orderDeck&quot;:225}," calcext:value-type="string">
            <text:p>{"id":"2-38","name":"裴松之","kana":"はいしょうし","traitText":null,"ruleText":"これが戦場にいる間、他のカードの「執筆」は発動しない。¶執筆 - ハイケイが戦場に置かれたとき、戦場の「執筆」を持つカード1つにつき1体まで、相手の戦場のイジンを手札に戻す。","legacyText":"魔力化","imageUrl":"https://one-draw.jp/ijinden/cardlist/002/card/02_038.png","expansion":25,"rarity":2,"type":1,"level":8,"color":8,"term":2,"trait":0,"legacy":1,"orderTable":170,"orderDeck":225},</text:p>
          </table:table-cell>
          <table:table-cell table:number-columns-repeated="16347"/>
        </table:table-row>
        <table:table-row table:style-name="ro2">
          <table:table-cell office:value-type="float" office:value="171" calcext:value-type="float">
            <text:p>171</text:p>
          </table:table-cell>
          <table:table-cell office:value-type="float" office:value="16" calcext:value-type="float">
            <text:p>16</text:p>
          </table:table-cell>
          <table:table-cell office:value-type="string" calcext:value-type="string">
            <text:p>2-39</text:p>
          </table:table-cell>
          <table:table-cell office:value-type="float" office:value="39" calcext:value-type="float">
            <text:p>39</text:p>
          </table:table-cell>
          <table:table-cell office:value-type="string" calcext:value-type="string">
            <text:p>陳寿</text:p>
          </table:table-cell>
          <table:table-cell office:value-type="string" calcext:value-type="string">
            <text:p>ちんじゅ</text:p>
          </table:table-cell>
          <table:table-cell office:value-type="string" calcext:value-type="string">
            <text:p>第２弾ブースターパック</text:p>
          </table:table-cell>
          <table:table-cell table:formula="of:=VLOOKUP([.G172];[$収録番号.$A$1:$収録番号.$B$9];2;0)" office:value-type="float" office:value="25" calcext:value-type="float">
            <text:p>25</text:p>
          </table:table-cell>
          <table:table-cell office:value-type="string" calcext:value-type="string">
            <text:p>N</text:p>
          </table:table-cell>
          <table:table-cell table:formula="of:=VLOOKUP([.I172];[$レアリティ番号.$A$1:$レアリティ番号.$B$4];2;0)" office:value-type="float" office:value="1" calcext:value-type="float">
            <text:p>1</text:p>
          </table:table-cell>
          <table:table-cell office:value-type="string" calcext:value-type="string">
            <text:p>イジン</text:p>
          </table:table-cell>
          <table:table-cell table:formula="of:=VLOOKUP([.K172];[$種類番号.$A$1:$種類番号.$B$4];2;0)" office:value-type="float" office:value="1" calcext:value-type="float">
            <text:p>1</text:p>
          </table:table-cell>
          <table:table-cell office:value-type="string" calcext:value-type="string">
            <text:p>黄</text:p>
          </table:table-cell>
          <table:table-cell table:formula="of:=VLOOKUP([.M172];[$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office:value-type="string" calcext:value-type="string">
            <text:p>執筆</text:p>
          </table:table-cell>
          <table:table-cell table:formula="of:=IFERROR(VLOOKUP([.$Q172];[$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172];[$特性番号.$A$1:$特性番号.$B$8];2;0);0)" office:value-type="float" office:value="0" calcext:value-type="float">
            <text:p>0</text:p>
          </table:table-cell>
          <table:table-cell office:value-type="string" calcext:value-type="string">
            <text:p>これが戦場にいる間、自分の戦場のイジンは「色：黄」を得る。¶執筆 - ハイケイが戦場に置かれたとき、戦場の黄のイジンが3体以上なら発動する。1ドローする。</text:p>
          </table:table-cell>
          <table:table-cell table:style-name="ce8" office:value-type="string" calcext:value-type="string">
            <text:p>1ドローする</text:p>
          </table:table-cell>
          <table:table-cell table:formula="of:=IFERROR(VLOOKUP([.$V172];[$遺業能力番号.$A$1:$遺業能力番号.$B$9];2;0);0)" office:value-type="float" office:value="4" calcext:value-type="float">
            <text:p>4</text:p>
          </table:table-cell>
          <table:table-cell office:value-type="string" calcext:value-type="string">
            <text:p>https://one-draw.jp/ijinden/cardlist/002/card/02_039.png</text:p>
          </table:table-cell>
          <table:table-cell table:formula="of:=CONCATENATE([$JSON.$A$1];[.$C172];[$JSON.$B$1];[.$E172];[$JSON.$C$1];[.$F172];[$JSON.$D$1];IF(ISNA([.$S172]);&quot;null&quot;;&quot;&quot;&quot;&quot;&amp;[.$S172]&amp;&quot;&quot;&quot;&quot;);[$JSON.$E$1];[.$U172];[$JSON.$F$1];IF(ISNA([.$V172]);&quot;null&quot;;&quot;&quot;&quot;&quot;&amp;[.$V172]&amp;&quot;&quot;&quot;&quot;);[$JSON.$G$1];[.$X172];[$JSON.$H$1];[.$H172];[$JSON.$I$1];[.J172];[$JSON.$J$1];[.$L172];[$JSON.$K$1];[.$O172];[$JSON.$L$1];[.$N172];[$JSON.$M$1];[.$R172];[$JSON.$N$1];[.$T172];[$JSON.$O$1];[.$W172];[$JSON.$P$1];[.$A172];[$JSON.$Q$1];[.$B172];[$JSON.$R$1])" office:value-type="string" office:string-value="{&quot;id&quot;:&quot;2-39&quot;,&quot;name&quot;:&quot;陳寿&quot;,&quot;kana&quot;:&quot;ちんじゅ&quot;,&quot;traitText&quot;:null,&quot;ruleText&quot;:&quot;これが戦場にいる間、自分の戦場のイジンは「色：黄」を得る。¶執筆 - ハイケイが戦場に置かれたとき、戦場の黄のイジンが3体以上なら発動する。1ドローする。&quot;,&quot;legacyText&quot;:&quot;1ドローする&quot;,&quot;imageUrl&quot;:&quot;https://one-draw.jp/ijinden/cardlist/002/card/02_039.png&quot;,&quot;expansion&quot;:25,&quot;rarity&quot;:1,&quot;type&quot;:1,&quot;level&quot;:1,&quot;color&quot;:8,&quot;term&quot;:2,&quot;trait&quot;:0,&quot;legacy&quot;:4,&quot;orderTable&quot;:171,&quot;orderDeck&quot;:16}," calcext:value-type="string">
            <text:p>{"id":"2-39","name":"陳寿","kana":"ちんじゅ","traitText":null,"ruleText":"これが戦場にいる間、自分の戦場のイジンは「色：黄」を得る。¶執筆 - ハイケイが戦場に置かれたとき、戦場の黄のイジンが3体以上なら発動する。1ドローする。","legacyText":"1ドローする","imageUrl":"https://one-draw.jp/ijinden/cardlist/002/card/02_039.png","expansion":25,"rarity":1,"type":1,"level":1,"color":8,"term":2,"trait":0,"legacy":4,"orderTable":171,"orderDeck":16},</text:p>
          </table:table-cell>
          <table:table-cell table:number-columns-repeated="16347"/>
        </table:table-row>
        <table:table-row table:style-name="ro2">
          <table:table-cell office:value-type="float" office:value="172" calcext:value-type="float">
            <text:p>172</text:p>
          </table:table-cell>
          <table:table-cell office:value-type="float" office:value="17" calcext:value-type="float">
            <text:p>17</text:p>
          </table:table-cell>
          <table:table-cell office:value-type="string" calcext:value-type="string">
            <text:p>2-40</text:p>
          </table:table-cell>
          <table:table-cell office:value-type="float" office:value="40" calcext:value-type="float">
            <text:p>40</text:p>
          </table:table-cell>
          <table:table-cell office:value-type="string" calcext:value-type="string">
            <text:p>足利尊氏</text:p>
          </table:table-cell>
          <table:table-cell office:value-type="string" calcext:value-type="string">
            <text:p>あしかがたかうじ</text:p>
          </table:table-cell>
          <table:table-cell office:value-type="string" calcext:value-type="string">
            <text:p>第２弾ブースターパック</text:p>
          </table:table-cell>
          <table:table-cell table:formula="of:=VLOOKUP([.G173];[$収録番号.$A$1:$収録番号.$B$9];2;0)" office:value-type="float" office:value="25" calcext:value-type="float">
            <text:p>25</text:p>
          </table:table-cell>
          <table:table-cell office:value-type="string" calcext:value-type="string">
            <text:p>N</text:p>
          </table:table-cell>
          <table:table-cell table:formula="of:=VLOOKUP([.I173];[$レアリティ番号.$A$1:$レアリティ番号.$B$4];2;0)" office:value-type="float" office:value="1" calcext:value-type="float">
            <text:p>1</text:p>
          </table:table-cell>
          <table:table-cell office:value-type="string" calcext:value-type="string">
            <text:p>イジン</text:p>
          </table:table-cell>
          <table:table-cell table:formula="of:=VLOOKUP([.K173];[$種類番号.$A$1:$種類番号.$B$4];2;0)" office:value-type="float" office:value="1" calcext:value-type="float">
            <text:p>1</text:p>
          </table:table-cell>
          <table:table-cell office:value-type="string" calcext:value-type="string">
            <text:p>黄</text:p>
          </table:table-cell>
          <table:table-cell table:formula="of:=VLOOKUP([.M173];[$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3];[$特性番号.$A$1:$特性番号.$B$8];2;0);0)" office:value-type="float" office:value="0" calcext:value-type="float">
            <text:p>0</text:p>
          </table:table-cell>
          <table:table-cell office:value-type="string" calcext:value-type="string">
            <text:p>イジンが相手の戦場に置かれるたび、戦場の「即応」を持つイジン1体を指定して発動できる。そのイジンを寝かせる。</text:p>
          </table:table-cell>
          <table:table-cell table:style-name="ce8" office:value-type="string" calcext:value-type="string">
            <text:p>1ドローする</text:p>
          </table:table-cell>
          <table:table-cell table:formula="of:=IFERROR(VLOOKUP([.$V173];[$遺業能力番号.$A$1:$遺業能力番号.$B$9];2;0);0)" office:value-type="float" office:value="4" calcext:value-type="float">
            <text:p>4</text:p>
          </table:table-cell>
          <table:table-cell office:value-type="string" calcext:value-type="string">
            <text:p>https://one-draw.jp/ijinden/cardlist/002/card/02_040.png</text:p>
          </table:table-cell>
          <table:table-cell table:formula="of:=CONCATENATE([$JSON.$A$1];[.$C173];[$JSON.$B$1];[.$E173];[$JSON.$C$1];[.$F173];[$JSON.$D$1];IF(ISNA([.$S173]);&quot;null&quot;;&quot;&quot;&quot;&quot;&amp;[.$S173]&amp;&quot;&quot;&quot;&quot;);[$JSON.$E$1];[.$U173];[$JSON.$F$1];IF(ISNA([.$V173]);&quot;null&quot;;&quot;&quot;&quot;&quot;&amp;[.$V173]&amp;&quot;&quot;&quot;&quot;);[$JSON.$G$1];[.$X173];[$JSON.$H$1];[.$H173];[$JSON.$I$1];[.J173];[$JSON.$J$1];[.$L173];[$JSON.$K$1];[.$O173];[$JSON.$L$1];[.$N173];[$JSON.$M$1];[.$R173];[$JSON.$N$1];[.$T173];[$JSON.$O$1];[.$W173];[$JSON.$P$1];[.$A173];[$JSON.$Q$1];[.$B173];[$JSON.$R$1])" office:value-type="string" office:string-value="{&quot;id&quot;:&quot;2-40&quot;,&quot;name&quot;:&quot;足利尊氏&quot;,&quot;kana&quot;:&quot;あしかがたかうじ&quot;,&quot;traitText&quot;:null,&quot;ruleText&quot;:&quot;イジンが相手の戦場に置かれるたび、戦場の「即応」を持つイジン1体を指定して発動できる。そのイジンを寝かせる。&quot;,&quot;legacyText&quot;:&quot;1ドローする&quot;,&quot;imageUrl&quot;:&quot;https://one-draw.jp/ijinden/cardlist/002/card/02_040.png&quot;,&quot;expansion&quot;:25,&quot;rarity&quot;:1,&quot;type&quot;:1,&quot;level&quot;:1,&quot;color&quot;:8,&quot;term&quot;:0,&quot;trait&quot;:0,&quot;legacy&quot;:4,&quot;orderTable&quot;:172,&quot;orderDeck&quot;:17}," calcext:value-type="string">
            <text:p>{"id":"2-40","name":"足利尊氏","kana":"あしかがたかうじ","traitText":null,"ruleText":"イジンが相手の戦場に置かれるたび、戦場の「即応」を持つイジン1体を指定して発動できる。そのイジンを寝かせる。","legacyText":"1ドローする","imageUrl":"https://one-draw.jp/ijinden/cardlist/002/card/02_040.png","expansion":25,"rarity":1,"type":1,"level":1,"color":8,"term":0,"trait":0,"legacy":4,"orderTable":172,"orderDeck":17},</text:p>
          </table:table-cell>
          <table:table-cell table:number-columns-repeated="16347"/>
        </table:table-row>
        <table:table-row table:style-name="ro2">
          <table:table-cell office:value-type="float" office:value="173" calcext:value-type="float">
            <text:p>173</text:p>
          </table:table-cell>
          <table:table-cell office:value-type="float" office:value="18" calcext:value-type="float">
            <text:p>18</text:p>
          </table:table-cell>
          <table:table-cell office:value-type="string" calcext:value-type="string">
            <text:p>2-41</text:p>
          </table:table-cell>
          <table:table-cell office:value-type="float" office:value="41" calcext:value-type="float">
            <text:p>41</text:p>
          </table:table-cell>
          <table:table-cell office:value-type="string" calcext:value-type="string">
            <text:p>カール・マルクス</text:p>
          </table:table-cell>
          <table:table-cell office:value-type="string" calcext:value-type="string">
            <text:p>かーるまるくす</text:p>
          </table:table-cell>
          <table:table-cell office:value-type="string" calcext:value-type="string">
            <text:p>第２弾ブースターパック</text:p>
          </table:table-cell>
          <table:table-cell table:formula="of:=VLOOKUP([.G174];[$収録番号.$A$1:$収録番号.$B$9];2;0)" office:value-type="float" office:value="25" calcext:value-type="float">
            <text:p>25</text:p>
          </table:table-cell>
          <table:table-cell office:value-type="string" calcext:value-type="string">
            <text:p>N</text:p>
          </table:table-cell>
          <table:table-cell table:formula="of:=VLOOKUP([.I174];[$レアリティ番号.$A$1:$レアリティ番号.$B$4];2;0)" office:value-type="float" office:value="1" calcext:value-type="float">
            <text:p>1</text:p>
          </table:table-cell>
          <table:table-cell office:value-type="string" calcext:value-type="string">
            <text:p>イジン</text:p>
          </table:table-cell>
          <table:table-cell table:formula="of:=VLOOKUP([.K174];[$種類番号.$A$1:$種類番号.$B$4];2;0)" office:value-type="float" office:value="1" calcext:value-type="float">
            <text:p>1</text:p>
          </table:table-cell>
          <table:table-cell office:value-type="string" calcext:value-type="string">
            <text:p>黄</text:p>
          </table:table-cell>
          <table:table-cell table:formula="of:=VLOOKUP([.M174];[$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4];[$特性番号.$A$1:$特性番号.$B$8];2;0);0)" office:value-type="float" office:value="0" calcext:value-type="float">
            <text:p>0</text:p>
          </table:table-cell>
          <table:table-cell office:value-type="string" calcext:value-type="string">
            <text:p>自分のメインフェイズが開始したとき、自分の手札の『ストーン』マリョク1つを相手に見せて発動できる。マリョク配置権+1する。</text:p>
          </table:table-cell>
          <table:table-cell table:style-name="ce8" office:value-type="string" calcext:value-type="string">
            <text:p>反魂</text:p>
          </table:table-cell>
          <table:table-cell table:formula="of:=IFERROR(VLOOKUP([.$V174];[$遺業能力番号.$A$1:$遺業能力番号.$B$9];2;0);0)" office:value-type="float" office:value="6" calcext:value-type="float">
            <text:p>6</text:p>
          </table:table-cell>
          <table:table-cell office:value-type="string" calcext:value-type="string">
            <text:p>https://one-draw.jp/ijinden/cardlist/002/card/02_041.png</text:p>
          </table:table-cell>
          <table:table-cell table:formula="of:=CONCATENATE([$JSON.$A$1];[.$C174];[$JSON.$B$1];[.$E174];[$JSON.$C$1];[.$F174];[$JSON.$D$1];IF(ISNA([.$S174]);&quot;null&quot;;&quot;&quot;&quot;&quot;&amp;[.$S174]&amp;&quot;&quot;&quot;&quot;);[$JSON.$E$1];[.$U174];[$JSON.$F$1];IF(ISNA([.$V174]);&quot;null&quot;;&quot;&quot;&quot;&quot;&amp;[.$V174]&amp;&quot;&quot;&quot;&quot;);[$JSON.$G$1];[.$X174];[$JSON.$H$1];[.$H174];[$JSON.$I$1];[.J174];[$JSON.$J$1];[.$L174];[$JSON.$K$1];[.$O174];[$JSON.$L$1];[.$N174];[$JSON.$M$1];[.$R174];[$JSON.$N$1];[.$T174];[$JSON.$O$1];[.$W174];[$JSON.$P$1];[.$A174];[$JSON.$Q$1];[.$B174];[$JSON.$R$1])" office:value-type="string" office:string-value="{&quot;id&quot;:&quot;2-41&quot;,&quot;name&quot;:&quot;カール・マルクス&quot;,&quot;kana&quot;:&quot;かーるまるくす&quot;,&quot;traitText&quot;:null,&quot;ruleText&quot;:&quot;自分のメインフェイズが開始したとき、自分の手札の『ストーン』マリョク1つを相手に見せて発動できる。マリョク配置権+1する。&quot;,&quot;legacyText&quot;:&quot;反魂&quot;,&quot;imageUrl&quot;:&quot;https://one-draw.jp/ijinden/cardlist/002/card/02_041.png&quot;,&quot;expansion&quot;:25,&quot;rarity&quot;:1,&quot;type&quot;:1,&quot;level&quot;:1,&quot;color&quot;:8,&quot;term&quot;:0,&quot;trait&quot;:0,&quot;legacy&quot;:6,&quot;orderTable&quot;:173,&quot;orderDeck&quot;:18}," calcext:value-type="string">
            <text:p>{"id":"2-41","name":"カール・マルクス","kana":"かーるまるくす","traitText":null,"ruleText":"自分のメインフェイズが開始したとき、自分の手札の『ストーン』マリョク1つを相手に見せて発動できる。マリョク配置権+1する。","legacyText":"反魂","imageUrl":"https://one-draw.jp/ijinden/cardlist/002/card/02_041.png","expansion":25,"rarity":1,"type":1,"level":1,"color":8,"term":0,"trait":0,"legacy":6,"orderTable":173,"orderDeck":18},</text:p>
          </table:table-cell>
          <table:table-cell table:number-columns-repeated="16347"/>
        </table:table-row>
        <table:table-row table:style-name="ro2">
          <table:table-cell office:value-type="float" office:value="174" calcext:value-type="float">
            <text:p>174</text:p>
          </table:table-cell>
          <table:table-cell office:value-type="float" office:value="95" calcext:value-type="float">
            <text:p>95</text:p>
          </table:table-cell>
          <table:table-cell office:value-type="string" calcext:value-type="string">
            <text:p>2-42</text:p>
          </table:table-cell>
          <table:table-cell office:value-type="float" office:value="42" calcext:value-type="float">
            <text:p>42</text:p>
          </table:table-cell>
          <table:table-cell office:value-type="string" calcext:value-type="string">
            <text:p>足利義満</text:p>
          </table:table-cell>
          <table:table-cell office:value-type="string" calcext:value-type="string">
            <text:p>あしかがよしみつ</text:p>
          </table:table-cell>
          <table:table-cell office:value-type="string" calcext:value-type="string">
            <text:p>第２弾ブースターパック</text:p>
          </table:table-cell>
          <table:table-cell table:formula="of:=VLOOKUP([.G175];[$収録番号.$A$1:$収録番号.$B$9];2;0)" office:value-type="float" office:value="25" calcext:value-type="float">
            <text:p>25</text:p>
          </table:table-cell>
          <table:table-cell office:value-type="string" calcext:value-type="string">
            <text:p>R</text:p>
          </table:table-cell>
          <table:table-cell table:formula="of:=VLOOKUP([.I175];[$レアリティ番号.$A$1:$レアリティ番号.$B$4];2;0)" office:value-type="float" office:value="2" calcext:value-type="float">
            <text:p>2</text:p>
          </table:table-cell>
          <table:table-cell office:value-type="string" calcext:value-type="string">
            <text:p>イジン</text:p>
          </table:table-cell>
          <table:table-cell table:formula="of:=VLOOKUP([.K175];[$種類番号.$A$1:$種類番号.$B$4];2;0)" office:value-type="float" office:value="1" calcext:value-type="float">
            <text:p>1</text:p>
          </table:table-cell>
          <table:table-cell office:value-type="string" calcext:value-type="string">
            <text:p>黄</text:p>
          </table:table-cell>
          <table:table-cell table:formula="of:=VLOOKUP([.M175];[$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5];[$特性番号.$A$1:$特性番号.$B$8];2;0);0)" office:value-type="float" office:value="0" calcext:value-type="float">
            <text:p>0</text:p>
          </table:table-cell>
          <table:table-cell office:value-type="string" calcext:value-type="string">
            <text:p>これが戦場にいる間、自分の戦場の他のイジンは「アタック+1000」を得る。¶これが戦場にいる間、自分の戦場のパワー3000以上のイジンは「航海 - アタッカーになったとき、1ドローする。」を得る。</text:p>
          </table:table-cell>
          <table:table-cell table:style-name="ce8" office:value-type="string" calcext:value-type="string">
            <text:p>1ドローする</text:p>
          </table:table-cell>
          <table:table-cell table:formula="of:=IFERROR(VLOOKUP([.$V175];[$遺業能力番号.$A$1:$遺業能力番号.$B$9];2;0);0)" office:value-type="float" office:value="4" calcext:value-type="float">
            <text:p>4</text:p>
          </table:table-cell>
          <table:table-cell office:value-type="string" calcext:value-type="string">
            <text:p>https://one-draw.jp/ijinden/cardlist/002/card/02_042.png</text:p>
          </table:table-cell>
          <table:table-cell table:formula="of:=CONCATENATE([$JSON.$A$1];[.$C175];[$JSON.$B$1];[.$E175];[$JSON.$C$1];[.$F175];[$JSON.$D$1];IF(ISNA([.$S175]);&quot;null&quot;;&quot;&quot;&quot;&quot;&amp;[.$S175]&amp;&quot;&quot;&quot;&quot;);[$JSON.$E$1];[.$U175];[$JSON.$F$1];IF(ISNA([.$V175]);&quot;null&quot;;&quot;&quot;&quot;&quot;&amp;[.$V175]&amp;&quot;&quot;&quot;&quot;);[$JSON.$G$1];[.$X175];[$JSON.$H$1];[.$H175];[$JSON.$I$1];[.J175];[$JSON.$J$1];[.$L175];[$JSON.$K$1];[.$O175];[$JSON.$L$1];[.$N175];[$JSON.$M$1];[.$R175];[$JSON.$N$1];[.$T175];[$JSON.$O$1];[.$W175];[$JSON.$P$1];[.$A175];[$JSON.$Q$1];[.$B175];[$JSON.$R$1])" office:value-type="string" office:string-value="{&quot;id&quot;:&quot;2-42&quot;,&quot;name&quot;:&quot;足利義満&quot;,&quot;kana&quot;:&quot;あしかがよしみつ&quot;,&quot;traitText&quot;:null,&quot;ruleText&quot;:&quot;これが戦場にいる間、自分の戦場の他のイジンは「アタック+1000」を得る。¶これが戦場にいる間、自分の戦場のパワー3000以上のイジンは「航海 - アタッカーになったとき、1ドローする。」を得る。&quot;,&quot;legacyText&quot;:&quot;1ドローする&quot;,&quot;imageUrl&quot;:&quot;https://one-draw.jp/ijinden/cardlist/002/card/02_042.png&quot;,&quot;expansion&quot;:25,&quot;rarity&quot;:2,&quot;type&quot;:1,&quot;level&quot;:3,&quot;color&quot;:8,&quot;term&quot;:0,&quot;trait&quot;:0,&quot;legacy&quot;:4,&quot;orderTable&quot;:174,&quot;orderDeck&quot;:95}," calcext:value-type="string">
            <text:p>{"id":"2-42","name":"足利義満","kana":"あしかがよしみつ","traitText":null,"ruleText":"これが戦場にいる間、自分の戦場の他のイジンは「アタック+1000」を得る。¶これが戦場にいる間、自分の戦場のパワー3000以上のイジンは「航海 - アタッカーになったとき、1ドローする。」を得る。","legacyText":"1ドローする","imageUrl":"https://one-draw.jp/ijinden/cardlist/002/card/02_042.png","expansion":25,"rarity":2,"type":1,"level":3,"color":8,"term":0,"trait":0,"legacy":4,"orderTable":174,"orderDeck":95},</text:p>
          </table:table-cell>
          <table:table-cell table:number-columns-repeated="16347"/>
        </table:table-row>
        <table:table-row table:style-name="ro2">
          <table:table-cell office:value-type="float" office:value="175" calcext:value-type="float">
            <text:p>175</text:p>
          </table:table-cell>
          <table:table-cell office:value-type="float" office:value="96" calcext:value-type="float">
            <text:p>96</text:p>
          </table:table-cell>
          <table:table-cell office:value-type="string" calcext:value-type="string">
            <text:p>2-43</text:p>
          </table:table-cell>
          <table:table-cell office:value-type="float" office:value="43" calcext:value-type="float">
            <text:p>43</text:p>
          </table:table-cell>
          <table:table-cell office:value-type="string" calcext:value-type="string">
            <text:p>観阿弥</text:p>
          </table:table-cell>
          <table:table-cell office:value-type="string" calcext:value-type="string">
            <text:p>かんあみ</text:p>
          </table:table-cell>
          <table:table-cell office:value-type="string" calcext:value-type="string">
            <text:p>第２弾ブースターパック</text:p>
          </table:table-cell>
          <table:table-cell table:formula="of:=VLOOKUP([.G176];[$収録番号.$A$1:$収録番号.$B$9];2;0)" office:value-type="float" office:value="25" calcext:value-type="float">
            <text:p>25</text:p>
          </table:table-cell>
          <table:table-cell office:value-type="string" calcext:value-type="string">
            <text:p>N</text:p>
          </table:table-cell>
          <table:table-cell table:formula="of:=VLOOKUP([.I176];[$レアリティ番号.$A$1:$レアリティ番号.$B$4];2;0)" office:value-type="float" office:value="1" calcext:value-type="float">
            <text:p>1</text:p>
          </table:table-cell>
          <table:table-cell office:value-type="string" calcext:value-type="string">
            <text:p>イジン</text:p>
          </table:table-cell>
          <table:table-cell table:formula="of:=VLOOKUP([.K176];[$種類番号.$A$1:$種類番号.$B$4];2;0)" office:value-type="float" office:value="1" calcext:value-type="float">
            <text:p>1</text:p>
          </table:table-cell>
          <table:table-cell office:value-type="string" calcext:value-type="string">
            <text:p>黄</text:p>
          </table:table-cell>
          <table:table-cell table:formula="of:=VLOOKUP([.M176];[$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6];[$特性番号.$A$1:$特性番号.$B$8];2;0);0)" office:value-type="float" office:value="0" calcext:value-type="float">
            <text:p>0</text:p>
          </table:table-cell>
          <table:table-cell office:value-type="string" calcext:value-type="string">
            <text:p>ウォッチャー¶レベル4以上のイジンが自分の戦場にいる間「パワー+2000」を得る。</text:p>
          </table:table-cell>
          <table:table-cell table:style-name="ce8" office:value-type="string" calcext:value-type="string">
            <text:p>1ドローする</text:p>
          </table:table-cell>
          <table:table-cell table:formula="of:=IFERROR(VLOOKUP([.$V176];[$遺業能力番号.$A$1:$遺業能力番号.$B$9];2;0);0)" office:value-type="float" office:value="4" calcext:value-type="float">
            <text:p>4</text:p>
          </table:table-cell>
          <table:table-cell office:value-type="string" calcext:value-type="string">
            <text:p>https://one-draw.jp/ijinden/cardlist/002/card/02_043.png</text:p>
          </table:table-cell>
          <table:table-cell table:formula="of:=CONCATENATE([$JSON.$A$1];[.$C176];[$JSON.$B$1];[.$E176];[$JSON.$C$1];[.$F176];[$JSON.$D$1];IF(ISNA([.$S176]);&quot;null&quot;;&quot;&quot;&quot;&quot;&amp;[.$S176]&amp;&quot;&quot;&quot;&quot;);[$JSON.$E$1];[.$U176];[$JSON.$F$1];IF(ISNA([.$V176]);&quot;null&quot;;&quot;&quot;&quot;&quot;&amp;[.$V176]&amp;&quot;&quot;&quot;&quot;);[$JSON.$G$1];[.$X176];[$JSON.$H$1];[.$H176];[$JSON.$I$1];[.J176];[$JSON.$J$1];[.$L176];[$JSON.$K$1];[.$O176];[$JSON.$L$1];[.$N176];[$JSON.$M$1];[.$R176];[$JSON.$N$1];[.$T176];[$JSON.$O$1];[.$W176];[$JSON.$P$1];[.$A176];[$JSON.$Q$1];[.$B176];[$JSON.$R$1])" office:value-type="string" office:string-value="{&quot;id&quot;:&quot;2-43&quot;,&quot;name&quot;:&quot;観阿弥&quot;,&quot;kana&quot;:&quot;かんあみ&quot;,&quot;traitText&quot;:null,&quot;ruleText&quot;:&quot;ウォッチャー¶レベル4以上のイジンが自分の戦場にいる間「パワー+2000」を得る。&quot;,&quot;legacyText&quot;:&quot;1ドローする&quot;,&quot;imageUrl&quot;:&quot;https://one-draw.jp/ijinden/cardlist/002/card/02_043.png&quot;,&quot;expansion&quot;:25,&quot;rarity&quot;:1,&quot;type&quot;:1,&quot;level&quot;:3,&quot;color&quot;:8,&quot;term&quot;:0,&quot;trait&quot;:0,&quot;legacy&quot;:4,&quot;orderTable&quot;:175,&quot;orderDeck&quot;:96}," calcext:value-type="string">
            <text:p>{"id":"2-43","name":"観阿弥","kana":"かんあみ","traitText":null,"ruleText":"ウォッチャー¶レベル4以上のイジンが自分の戦場にいる間「パワー+2000」を得る。","legacyText":"1ドローする","imageUrl":"https://one-draw.jp/ijinden/cardlist/002/card/02_043.png","expansion":25,"rarity":1,"type":1,"level":3,"color":8,"term":0,"trait":0,"legacy":4,"orderTable":175,"orderDeck":96},</text:p>
          </table:table-cell>
          <table:table-cell table:number-columns-repeated="16347"/>
        </table:table-row>
        <table:table-row table:style-name="ro2">
          <table:table-cell office:value-type="float" office:value="176" calcext:value-type="float">
            <text:p>176</text:p>
          </table:table-cell>
          <table:table-cell office:value-type="float" office:value="135" calcext:value-type="float">
            <text:p>135</text:p>
          </table:table-cell>
          <table:table-cell office:value-type="string" calcext:value-type="string">
            <text:p>2-44</text:p>
          </table:table-cell>
          <table:table-cell office:value-type="float" office:value="44" calcext:value-type="float">
            <text:p>44</text:p>
          </table:table-cell>
          <table:table-cell office:value-type="string" calcext:value-type="string">
            <text:p>世阿弥</text:p>
          </table:table-cell>
          <table:table-cell office:value-type="string" calcext:value-type="string">
            <text:p>ぜあみ</text:p>
          </table:table-cell>
          <table:table-cell office:value-type="string" calcext:value-type="string">
            <text:p>第２弾ブースターパック</text:p>
          </table:table-cell>
          <table:table-cell table:formula="of:=VLOOKUP([.G177];[$収録番号.$A$1:$収録番号.$B$9];2;0)" office:value-type="float" office:value="25" calcext:value-type="float">
            <text:p>25</text:p>
          </table:table-cell>
          <table:table-cell office:value-type="string" calcext:value-type="string">
            <text:p>N</text:p>
          </table:table-cell>
          <table:table-cell table:formula="of:=VLOOKUP([.I177];[$レアリティ番号.$A$1:$レアリティ番号.$B$4];2;0)" office:value-type="float" office:value="1" calcext:value-type="float">
            <text:p>1</text:p>
          </table:table-cell>
          <table:table-cell office:value-type="string" calcext:value-type="string">
            <text:p>イジン</text:p>
          </table:table-cell>
          <table:table-cell table:formula="of:=VLOOKUP([.K177];[$種類番号.$A$1:$種類番号.$B$4];2;0)" office:value-type="float" office:value="1" calcext:value-type="float">
            <text:p>1</text:p>
          </table:table-cell>
          <table:table-cell office:value-type="string" calcext:value-type="string">
            <text:p>黄</text:p>
          </table:table-cell>
          <table:table-cell table:formula="of:=VLOOKUP([.M177];[$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7];[$特性番号.$A$1:$特性番号.$B$8];2;0);0)" office:value-type="float" office:value="0" calcext:value-type="float">
            <text:p>0</text:p>
          </table:table-cell>
          <table:table-cell office:value-type="string" calcext:value-type="string">
            <text:p>ウォッチャー¶レベル3以下のイジンが自分の戦場にいる間「即応 パワー+2000」を得る。</text:p>
          </table:table-cell>
          <table:table-cell table:style-name="ce8" office:value-type="string" calcext:value-type="string">
            <text:p>1ドローする</text:p>
          </table:table-cell>
          <table:table-cell table:formula="of:=IFERROR(VLOOKUP([.$V177];[$遺業能力番号.$A$1:$遺業能力番号.$B$9];2;0);0)" office:value-type="float" office:value="4" calcext:value-type="float">
            <text:p>4</text:p>
          </table:table-cell>
          <table:table-cell office:value-type="string" calcext:value-type="string">
            <text:p>https://one-draw.jp/ijinden/cardlist/002/card/02_044.png</text:p>
          </table:table-cell>
          <table:table-cell table:formula="of:=CONCATENATE([$JSON.$A$1];[.$C177];[$JSON.$B$1];[.$E177];[$JSON.$C$1];[.$F177];[$JSON.$D$1];IF(ISNA([.$S177]);&quot;null&quot;;&quot;&quot;&quot;&quot;&amp;[.$S177]&amp;&quot;&quot;&quot;&quot;);[$JSON.$E$1];[.$U177];[$JSON.$F$1];IF(ISNA([.$V177]);&quot;null&quot;;&quot;&quot;&quot;&quot;&amp;[.$V177]&amp;&quot;&quot;&quot;&quot;);[$JSON.$G$1];[.$X177];[$JSON.$H$1];[.$H177];[$JSON.$I$1];[.J177];[$JSON.$J$1];[.$L177];[$JSON.$K$1];[.$O177];[$JSON.$L$1];[.$N177];[$JSON.$M$1];[.$R177];[$JSON.$N$1];[.$T177];[$JSON.$O$1];[.$W177];[$JSON.$P$1];[.$A177];[$JSON.$Q$1];[.$B177];[$JSON.$R$1])" office:value-type="string" office:string-value="{&quot;id&quot;:&quot;2-44&quot;,&quot;name&quot;:&quot;世阿弥&quot;,&quot;kana&quot;:&quot;ぜあみ&quot;,&quot;traitText&quot;:null,&quot;ruleText&quot;:&quot;ウォッチャー¶レベル3以下のイジンが自分の戦場にいる間「即応 パワー+2000」を得る。&quot;,&quot;legacyText&quot;:&quot;1ドローする&quot;,&quot;imageUrl&quot;:&quot;https://one-draw.jp/ijinden/cardlist/002/card/02_044.png&quot;,&quot;expansion&quot;:25,&quot;rarity&quot;:1,&quot;type&quot;:1,&quot;level&quot;:4,&quot;color&quot;:8,&quot;term&quot;:0,&quot;trait&quot;:0,&quot;legacy&quot;:4,&quot;orderTable&quot;:176,&quot;orderDeck&quot;:135}," calcext:value-type="string">
            <text:p>{"id":"2-44","name":"世阿弥","kana":"ぜあみ","traitText":null,"ruleText":"ウォッチャー¶レベル3以下のイジンが自分の戦場にいる間「即応 パワー+2000」を得る。","legacyText":"1ドローする","imageUrl":"https://one-draw.jp/ijinden/cardlist/002/card/02_044.png","expansion":25,"rarity":1,"type":1,"level":4,"color":8,"term":0,"trait":0,"legacy":4,"orderTable":176,"orderDeck":135},</text:p>
          </table:table-cell>
          <table:table-cell table:number-columns-repeated="16347"/>
        </table:table-row>
        <table:table-row table:style-name="ro2">
          <table:table-cell office:value-type="float" office:value="177" calcext:value-type="float">
            <text:p>177</text:p>
          </table:table-cell>
          <table:table-cell office:value-type="float" office:value="55" calcext:value-type="float">
            <text:p>55</text:p>
          </table:table-cell>
          <table:table-cell office:value-type="string" calcext:value-type="string">
            <text:p>2-45</text:p>
          </table:table-cell>
          <table:table-cell office:value-type="float" office:value="45" calcext:value-type="float">
            <text:p>45</text:p>
          </table:table-cell>
          <table:table-cell office:value-type="string" calcext:value-type="string">
            <text:p>新井白石</text:p>
          </table:table-cell>
          <table:table-cell office:value-type="string" calcext:value-type="string">
            <text:p>あらいはくせき</text:p>
          </table:table-cell>
          <table:table-cell office:value-type="string" calcext:value-type="string">
            <text:p>第２弾ブースターパック</text:p>
          </table:table-cell>
          <table:table-cell table:formula="of:=VLOOKUP([.G178];[$収録番号.$A$1:$収録番号.$B$9];2;0)" office:value-type="float" office:value="25" calcext:value-type="float">
            <text:p>25</text:p>
          </table:table-cell>
          <table:table-cell office:value-type="string" calcext:value-type="string">
            <text:p>R</text:p>
          </table:table-cell>
          <table:table-cell table:formula="of:=VLOOKUP([.I178];[$レアリティ番号.$A$1:$レアリティ番号.$B$4];2;0)" office:value-type="float" office:value="2" calcext:value-type="float">
            <text:p>2</text:p>
          </table:table-cell>
          <table:table-cell office:value-type="string" calcext:value-type="string">
            <text:p>イジン</text:p>
          </table:table-cell>
          <table:table-cell table:formula="of:=VLOOKUP([.K178];[$種類番号.$A$1:$種類番号.$B$4];2;0)" office:value-type="float" office:value="1" calcext:value-type="float">
            <text:p>1</text:p>
          </table:table-cell>
          <table:table-cell office:value-type="string" calcext:value-type="string">
            <text:p>黄</text:p>
          </table:table-cell>
          <table:table-cell table:formula="of:=VLOOKUP([.M178];[$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8];[$特性番号.$A$1:$特性番号.$B$8];2;0);0)" office:value-type="float" office:value="0" calcext:value-type="float">
            <text:p>0</text:p>
          </table:table-cell>
          <table:table-cell office:value-type="string" calcext:value-type="string">
            <text:p>ハイケイが相手の戦場に置かれる際、そのハイケイは寝ている状態で戦場に置かれる。¶相手の戦場の寝ているハイケイは、能力すべてを失う。この能力は、能力によって失われない。</text:p>
          </table:table-cell>
          <table:table-cell table:style-name="ce8" office:value-type="string" calcext:value-type="string">
            <text:p>1ドローする</text:p>
          </table:table-cell>
          <table:table-cell table:formula="of:=IFERROR(VLOOKUP([.$V178];[$遺業能力番号.$A$1:$遺業能力番号.$B$9];2;0);0)" office:value-type="float" office:value="4" calcext:value-type="float">
            <text:p>4</text:p>
          </table:table-cell>
          <table:table-cell office:value-type="string" calcext:value-type="string">
            <text:p>https://one-draw.jp/ijinden/cardlist/002/card/02_045.png</text:p>
          </table:table-cell>
          <table:table-cell table:formula="of:=CONCATENATE([$JSON.$A$1];[.$C178];[$JSON.$B$1];[.$E178];[$JSON.$C$1];[.$F178];[$JSON.$D$1];IF(ISNA([.$S178]);&quot;null&quot;;&quot;&quot;&quot;&quot;&amp;[.$S178]&amp;&quot;&quot;&quot;&quot;);[$JSON.$E$1];[.$U178];[$JSON.$F$1];IF(ISNA([.$V178]);&quot;null&quot;;&quot;&quot;&quot;&quot;&amp;[.$V178]&amp;&quot;&quot;&quot;&quot;);[$JSON.$G$1];[.$X178];[$JSON.$H$1];[.$H178];[$JSON.$I$1];[.J178];[$JSON.$J$1];[.$L178];[$JSON.$K$1];[.$O178];[$JSON.$L$1];[.$N178];[$JSON.$M$1];[.$R178];[$JSON.$N$1];[.$T178];[$JSON.$O$1];[.$W178];[$JSON.$P$1];[.$A178];[$JSON.$Q$1];[.$B178];[$JSON.$R$1])" office:value-type="string" office:string-value="{&quot;id&quot;:&quot;2-45&quot;,&quot;name&quot;:&quot;新井白石&quot;,&quot;kana&quot;:&quot;あらいはくせき&quot;,&quot;traitText&quot;:null,&quot;ruleText&quot;:&quot;ハイケイが相手の戦場に置かれる際、そのハイケイは寝ている状態で戦場に置かれる。¶相手の戦場の寝ているハイケイは、能力すべてを失う。この能力は、能力によって失われない。&quot;,&quot;legacyText&quot;:&quot;1ドローする&quot;,&quot;imageUrl&quot;:&quot;https://one-draw.jp/ijinden/cardlist/002/card/02_045.png&quot;,&quot;expansion&quot;:25,&quot;rarity&quot;:2,&quot;type&quot;:1,&quot;level&quot;:2,&quot;color&quot;:8,&quot;term&quot;:0,&quot;trait&quot;:0,&quot;legacy&quot;:4,&quot;orderTable&quot;:177,&quot;orderDeck&quot;:55}," calcext:value-type="string">
            <text:p>{"id":"2-45","name":"新井白石","kana":"あらいはくせき","traitText":null,"ruleText":"ハイケイが相手の戦場に置かれる際、そのハイケイは寝ている状態で戦場に置かれる。¶相手の戦場の寝ているハイケイは、能力すべてを失う。この能力は、能力によって失われない。","legacyText":"1ドローする","imageUrl":"https://one-draw.jp/ijinden/cardlist/002/card/02_045.png","expansion":25,"rarity":2,"type":1,"level":2,"color":8,"term":0,"trait":0,"legacy":4,"orderTable":177,"orderDeck":55},</text:p>
          </table:table-cell>
          <table:table-cell table:number-columns-repeated="16347"/>
        </table:table-row>
        <table:table-row table:style-name="ro2">
          <table:table-cell office:value-type="float" office:value="178" calcext:value-type="float">
            <text:p>178</text:p>
          </table:table-cell>
          <table:table-cell office:value-type="float" office:value="136" calcext:value-type="float">
            <text:p>136</text:p>
          </table:table-cell>
          <table:table-cell office:value-type="string" calcext:value-type="string">
            <text:p>2-46</text:p>
          </table:table-cell>
          <table:table-cell office:value-type="float" office:value="46" calcext:value-type="float">
            <text:p>46</text:p>
          </table:table-cell>
          <table:table-cell office:value-type="string" calcext:value-type="string">
            <text:p>孫夫人</text:p>
          </table:table-cell>
          <table:table-cell office:value-type="string" calcext:value-type="string">
            <text:p>そんふじん</text:p>
          </table:table-cell>
          <table:table-cell office:value-type="string" calcext:value-type="string">
            <text:p>第２弾ブースターパック</text:p>
          </table:table-cell>
          <table:table-cell table:formula="of:=VLOOKUP([.G179];[$収録番号.$A$1:$収録番号.$B$9];2;0)" office:value-type="float" office:value="25" calcext:value-type="float">
            <text:p>25</text:p>
          </table:table-cell>
          <table:table-cell office:value-type="string" calcext:value-type="string">
            <text:p>N</text:p>
          </table:table-cell>
          <table:table-cell table:formula="of:=VLOOKUP([.I179];[$レアリティ番号.$A$1:$レアリティ番号.$B$4];2;0)" office:value-type="float" office:value="1" calcext:value-type="float">
            <text:p>1</text:p>
          </table:table-cell>
          <table:table-cell office:value-type="string" calcext:value-type="string">
            <text:p>イジン</text:p>
          </table:table-cell>
          <table:table-cell table:formula="of:=VLOOKUP([.K179];[$種類番号.$A$1:$種類番号.$B$4];2;0)" office:value-type="float" office:value="1" calcext:value-type="float">
            <text:p>1</text:p>
          </table:table-cell>
          <table:table-cell office:value-type="string" calcext:value-type="string">
            <text:p>黄</text:p>
          </table:table-cell>
          <table:table-cell table:formula="of:=VLOOKUP([.M179];[$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9];[$特性番号.$A$1:$特性番号.$B$8];2;0);0)" office:value-type="float" office:value="0" calcext:value-type="float">
            <text:p>0</text:p>
          </table:table-cell>
          <table:table-cell office:value-type="string" calcext:value-type="string">
            <text:p>戦場に置かれたとき、自分の手札の「装備」を持つカード1つを見せて発動できる。イジン召喚権+1するか、このターンの間「即応」を得る。¶これが戦場にいる間、装備しているイジンは、装備していないイジンにブロックされない。</text:p>
          </table:table-cell>
          <table:table-cell table:style-name="ce8" office:value-type="string" calcext:value-type="string">
            <text:p>1ドローする</text:p>
          </table:table-cell>
          <table:table-cell table:formula="of:=IFERROR(VLOOKUP([.$V179];[$遺業能力番号.$A$1:$遺業能力番号.$B$9];2;0);0)" office:value-type="float" office:value="4" calcext:value-type="float">
            <text:p>4</text:p>
          </table:table-cell>
          <table:table-cell office:value-type="string" calcext:value-type="string">
            <text:p>https://one-draw.jp/ijinden/cardlist/002/card/02_046.png</text:p>
          </table:table-cell>
          <table:table-cell table:formula="of:=CONCATENATE([$JSON.$A$1];[.$C179];[$JSON.$B$1];[.$E179];[$JSON.$C$1];[.$F179];[$JSON.$D$1];IF(ISNA([.$S179]);&quot;null&quot;;&quot;&quot;&quot;&quot;&amp;[.$S179]&amp;&quot;&quot;&quot;&quot;);[$JSON.$E$1];[.$U179];[$JSON.$F$1];IF(ISNA([.$V179]);&quot;null&quot;;&quot;&quot;&quot;&quot;&amp;[.$V179]&amp;&quot;&quot;&quot;&quot;);[$JSON.$G$1];[.$X179];[$JSON.$H$1];[.$H179];[$JSON.$I$1];[.J179];[$JSON.$J$1];[.$L179];[$JSON.$K$1];[.$O179];[$JSON.$L$1];[.$N179];[$JSON.$M$1];[.$R179];[$JSON.$N$1];[.$T179];[$JSON.$O$1];[.$W179];[$JSON.$P$1];[.$A179];[$JSON.$Q$1];[.$B179];[$JSON.$R$1])" office:value-type="string" office:string-value="{&quot;id&quot;:&quot;2-46&quot;,&quot;name&quot;:&quot;孫夫人&quot;,&quot;kana&quot;:&quot;そんふじん&quot;,&quot;traitText&quot;:null,&quot;ruleText&quot;:&quot;戦場に置かれたとき、自分の手札の「装備」を持つカード1つを見せて発動できる。イジン召喚権+1するか、このターンの間「即応」を得る。¶これが戦場にいる間、装備しているイジンは、装備していないイジンにブロックされない。&quot;,&quot;legacyText&quot;:&quot;1ドローする&quot;,&quot;imageUrl&quot;:&quot;https://one-draw.jp/ijinden/cardlist/002/card/02_046.png&quot;,&quot;expansion&quot;:25,&quot;rarity&quot;:1,&quot;type&quot;:1,&quot;level&quot;:4,&quot;color&quot;:8,&quot;term&quot;:0,&quot;trait&quot;:0,&quot;legacy&quot;:4,&quot;orderTable&quot;:178,&quot;orderDeck&quot;:136}," calcext:value-type="string">
            <text:p>{"id":"2-46","name":"孫夫人","kana":"そんふじん","traitText":null,"ruleText":"戦場に置かれたとき、自分の手札の「装備」を持つカード1つを見せて発動できる。イジン召喚権+1するか、このターンの間「即応」を得る。¶これが戦場にいる間、装備しているイジンは、装備していないイジンにブロックされない。","legacyText":"1ドローする","imageUrl":"https://one-draw.jp/ijinden/cardlist/002/card/02_046.png","expansion":25,"rarity":1,"type":1,"level":4,"color":8,"term":0,"trait":0,"legacy":4,"orderTable":178,"orderDeck":136},</text:p>
          </table:table-cell>
          <table:table-cell table:number-columns-repeated="16347"/>
        </table:table-row>
        <table:table-row table:style-name="ro2">
          <table:table-cell office:value-type="float" office:value="179" calcext:value-type="float">
            <text:p>179</text:p>
          </table:table-cell>
          <table:table-cell office:value-type="float" office:value="97" calcext:value-type="float">
            <text:p>97</text:p>
          </table:table-cell>
          <table:table-cell office:value-type="string" calcext:value-type="string">
            <text:p>2-47</text:p>
          </table:table-cell>
          <table:table-cell office:value-type="float" office:value="47" calcext:value-type="float">
            <text:p>47</text:p>
          </table:table-cell>
          <table:table-cell office:value-type="string" calcext:value-type="string">
            <text:p>法然</text:p>
          </table:table-cell>
          <table:table-cell office:value-type="string" calcext:value-type="string">
            <text:p>ほうねん</text:p>
          </table:table-cell>
          <table:table-cell office:value-type="string" calcext:value-type="string">
            <text:p>第２弾ブースターパック</text:p>
          </table:table-cell>
          <table:table-cell table:formula="of:=VLOOKUP([.G180];[$収録番号.$A$1:$収録番号.$B$9];2;0)" office:value-type="float" office:value="25" calcext:value-type="float">
            <text:p>25</text:p>
          </table:table-cell>
          <table:table-cell office:value-type="string" calcext:value-type="string">
            <text:p>N</text:p>
          </table:table-cell>
          <table:table-cell table:formula="of:=VLOOKUP([.I180];[$レアリティ番号.$A$1:$レアリティ番号.$B$4];2;0)" office:value-type="float" office:value="1" calcext:value-type="float">
            <text:p>1</text:p>
          </table:table-cell>
          <table:table-cell office:value-type="string" calcext:value-type="string">
            <text:p>イジン</text:p>
          </table:table-cell>
          <table:table-cell table:formula="of:=VLOOKUP([.K180];[$種類番号.$A$1:$種類番号.$B$4];2;0)" office:value-type="float" office:value="1" calcext:value-type="float">
            <text:p>1</text:p>
          </table:table-cell>
          <table:table-cell office:value-type="string" calcext:value-type="string">
            <text:p>黄</text:p>
          </table:table-cell>
          <table:table-cell table:formula="of:=VLOOKUP([.M180];[$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0];[$特性番号.$A$1:$特性番号.$B$8];2;0);0)" office:value-type="float" office:value="0" calcext:value-type="float">
            <text:p>0</text:p>
          </table:table-cell>
          <table:table-cell office:value-type="string" calcext:value-type="string">
            <text:p>カードが自分の墓地にない間「ウォッチャー」を得る。¶自分のエンドフェイズが開始したとき、墓地のマリョクでないカード1つを指定して発動できる。そのカードを山札の下に戻す。</text:p>
          </table:table-cell>
          <table:table-cell table:style-name="ce8" office:value-type="string" calcext:value-type="string">
            <text:p>山札の上か下に戻す</text:p>
          </table:table-cell>
          <table:table-cell table:formula="of:=IFERROR(VLOOKUP([.$V180];[$遺業能力番号.$A$1:$遺業能力番号.$B$9];2;0);0)" office:value-type="float" office:value="7" calcext:value-type="float">
            <text:p>7</text:p>
          </table:table-cell>
          <table:table-cell office:value-type="string" calcext:value-type="string">
            <text:p>https://one-draw.jp/ijinden/cardlist/002/card/02_047.png</text:p>
          </table:table-cell>
          <table:table-cell table:formula="of:=CONCATENATE([$JSON.$A$1];[.$C180];[$JSON.$B$1];[.$E180];[$JSON.$C$1];[.$F180];[$JSON.$D$1];IF(ISNA([.$S180]);&quot;null&quot;;&quot;&quot;&quot;&quot;&amp;[.$S180]&amp;&quot;&quot;&quot;&quot;);[$JSON.$E$1];[.$U180];[$JSON.$F$1];IF(ISNA([.$V180]);&quot;null&quot;;&quot;&quot;&quot;&quot;&amp;[.$V180]&amp;&quot;&quot;&quot;&quot;);[$JSON.$G$1];[.$X180];[$JSON.$H$1];[.$H180];[$JSON.$I$1];[.J180];[$JSON.$J$1];[.$L180];[$JSON.$K$1];[.$O180];[$JSON.$L$1];[.$N180];[$JSON.$M$1];[.$R180];[$JSON.$N$1];[.$T180];[$JSON.$O$1];[.$W180];[$JSON.$P$1];[.$A180];[$JSON.$Q$1];[.$B180];[$JSON.$R$1])" office:value-type="string" office:string-value="{&quot;id&quot;:&quot;2-47&quot;,&quot;name&quot;:&quot;法然&quot;,&quot;kana&quot;:&quot;ほうねん&quot;,&quot;traitText&quot;:null,&quot;ruleText&quot;:&quot;カードが自分の墓地にない間「ウォッチャー」を得る。¶自分のエンドフェイズが開始したとき、墓地のマリョクでないカード1つを指定して発動できる。そのカードを山札の下に戻す。&quot;,&quot;legacyText&quot;:&quot;山札の上か下に戻す&quot;,&quot;imageUrl&quot;:&quot;https://one-draw.jp/ijinden/cardlist/002/card/02_047.png&quot;,&quot;expansion&quot;:25,&quot;rarity&quot;:1,&quot;type&quot;:1,&quot;level&quot;:3,&quot;color&quot;:8,&quot;term&quot;:0,&quot;trait&quot;:0,&quot;legacy&quot;:7,&quot;orderTable&quot;:179,&quot;orderDeck&quot;:97}," calcext:value-type="string">
            <text:p>{"id":"2-47","name":"法然","kana":"ほうねん","traitText":null,"ruleText":"カードが自分の墓地にない間「ウォッチャー」を得る。¶自分のエンドフェイズが開始したとき、墓地のマリョクでないカード1つを指定して発動できる。そのカードを山札の下に戻す。","legacyText":"山札の上か下に戻す","imageUrl":"https://one-draw.jp/ijinden/cardlist/002/card/02_047.png","expansion":25,"rarity":1,"type":1,"level":3,"color":8,"term":0,"trait":0,"legacy":7,"orderTable":179,"orderDeck":97},</text:p>
          </table:table-cell>
          <table:table-cell table:number-columns-repeated="16347"/>
        </table:table-row>
        <table:table-row table:style-name="ro2">
          <table:table-cell office:value-type="float" office:value="180" calcext:value-type="float">
            <text:p>180</text:p>
          </table:table-cell>
          <table:table-cell office:value-type="float" office:value="173" calcext:value-type="float">
            <text:p>173</text:p>
          </table:table-cell>
          <table:table-cell office:value-type="string" calcext:value-type="string">
            <text:p>2-48</text:p>
          </table:table-cell>
          <table:table-cell office:value-type="float" office:value="48" calcext:value-type="float">
            <text:p>48</text:p>
          </table:table-cell>
          <table:table-cell office:value-type="string" calcext:value-type="string">
            <text:p>一遍</text:p>
          </table:table-cell>
          <table:table-cell office:value-type="string" calcext:value-type="string">
            <text:p>いっぺん</text:p>
          </table:table-cell>
          <table:table-cell office:value-type="string" calcext:value-type="string">
            <text:p>第２弾ブースターパック</text:p>
          </table:table-cell>
          <table:table-cell table:formula="of:=VLOOKUP([.G181];[$収録番号.$A$1:$収録番号.$B$9];2;0)" office:value-type="float" office:value="25" calcext:value-type="float">
            <text:p>25</text:p>
          </table:table-cell>
          <table:table-cell office:value-type="string" calcext:value-type="string">
            <text:p>N</text:p>
          </table:table-cell>
          <table:table-cell table:formula="of:=VLOOKUP([.I181];[$レアリティ番号.$A$1:$レアリティ番号.$B$4];2;0)" office:value-type="float" office:value="1" calcext:value-type="float">
            <text:p>1</text:p>
          </table:table-cell>
          <table:table-cell office:value-type="string" calcext:value-type="string">
            <text:p>イジン</text:p>
          </table:table-cell>
          <table:table-cell table:formula="of:=VLOOKUP([.K181];[$種類番号.$A$1:$種類番号.$B$4];2;0)" office:value-type="float" office:value="1" calcext:value-type="float">
            <text:p>1</text:p>
          </table:table-cell>
          <table:table-cell office:value-type="string" calcext:value-type="string">
            <text:p>黄</text:p>
          </table:table-cell>
          <table:table-cell table:formula="of:=VLOOKUP([.M181];[$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1];[$特性番号.$A$1:$特性番号.$B$8];2;0);0)" office:value-type="float" office:value="0" calcext:value-type="float">
            <text:p>0</text:p>
          </table:table-cell>
          <table:table-cell office:value-type="string" calcext:value-type="string">
            <text:p>カードが自分の墓地にない間「ウォッチャー」を得る。¶カードが相手の墓地にない間「トリプルプレッシャー」を得る。</text:p>
          </table:table-cell>
          <table:table-cell table:style-name="ce8" office:value-type="string" calcext:value-type="string">
            <text:p>山札の上か下に戻す</text:p>
          </table:table-cell>
          <table:table-cell table:formula="of:=IFERROR(VLOOKUP([.$V181];[$遺業能力番号.$A$1:$遺業能力番号.$B$9];2;0);0)" office:value-type="float" office:value="7" calcext:value-type="float">
            <text:p>7</text:p>
          </table:table-cell>
          <table:table-cell office:value-type="string" calcext:value-type="string">
            <text:p>https://one-draw.jp/ijinden/cardlist/002/card/02_048.png</text:p>
          </table:table-cell>
          <table:table-cell table:formula="of:=CONCATENATE([$JSON.$A$1];[.$C181];[$JSON.$B$1];[.$E181];[$JSON.$C$1];[.$F181];[$JSON.$D$1];IF(ISNA([.$S181]);&quot;null&quot;;&quot;&quot;&quot;&quot;&amp;[.$S181]&amp;&quot;&quot;&quot;&quot;);[$JSON.$E$1];[.$U181];[$JSON.$F$1];IF(ISNA([.$V181]);&quot;null&quot;;&quot;&quot;&quot;&quot;&amp;[.$V181]&amp;&quot;&quot;&quot;&quot;);[$JSON.$G$1];[.$X181];[$JSON.$H$1];[.$H181];[$JSON.$I$1];[.J181];[$JSON.$J$1];[.$L181];[$JSON.$K$1];[.$O181];[$JSON.$L$1];[.$N181];[$JSON.$M$1];[.$R181];[$JSON.$N$1];[.$T181];[$JSON.$O$1];[.$W181];[$JSON.$P$1];[.$A181];[$JSON.$Q$1];[.$B181];[$JSON.$R$1])" office:value-type="string" office:string-value="{&quot;id&quot;:&quot;2-48&quot;,&quot;name&quot;:&quot;一遍&quot;,&quot;kana&quot;:&quot;いっぺん&quot;,&quot;traitText&quot;:null,&quot;ruleText&quot;:&quot;カードが自分の墓地にない間「ウォッチャー」を得る。¶カードが相手の墓地にない間「トリプルプレッシャー」を得る。&quot;,&quot;legacyText&quot;:&quot;山札の上か下に戻す&quot;,&quot;imageUrl&quot;:&quot;https://one-draw.jp/ijinden/cardlist/002/card/02_048.png&quot;,&quot;expansion&quot;:25,&quot;rarity&quot;:1,&quot;type&quot;:1,&quot;level&quot;:5,&quot;color&quot;:8,&quot;term&quot;:0,&quot;trait&quot;:0,&quot;legacy&quot;:7,&quot;orderTable&quot;:180,&quot;orderDeck&quot;:173}," calcext:value-type="string">
            <text:p>{"id":"2-48","name":"一遍","kana":"いっぺん","traitText":null,"ruleText":"カードが自分の墓地にない間「ウォッチャー」を得る。¶カードが相手の墓地にない間「トリプルプレッシャー」を得る。","legacyText":"山札の上か下に戻す","imageUrl":"https://one-draw.jp/ijinden/cardlist/002/card/02_048.png","expansion":25,"rarity":1,"type":1,"level":5,"color":8,"term":0,"trait":0,"legacy":7,"orderTable":180,"orderDeck":173},</text:p>
          </table:table-cell>
          <table:table-cell table:number-columns-repeated="16347"/>
        </table:table-row>
        <table:table-row table:style-name="ro2">
          <table:table-cell office:value-type="float" office:value="181" calcext:value-type="float">
            <text:p>181</text:p>
          </table:table-cell>
          <table:table-cell office:value-type="float" office:value="240" calcext:value-type="float">
            <text:p>240</text:p>
          </table:table-cell>
          <table:table-cell office:value-type="string" calcext:value-type="string">
            <text:p>2-49</text:p>
          </table:table-cell>
          <table:table-cell office:value-type="float" office:value="49" calcext:value-type="float">
            <text:p>49</text:p>
          </table:table-cell>
          <table:table-cell office:value-type="string" calcext:value-type="string">
            <text:p>籠城戦</text:p>
          </table:table-cell>
          <table:table-cell office:value-type="string" calcext:value-type="string">
            <text:p>ろうじょうせん</text:p>
          </table:table-cell>
          <table:table-cell office:value-type="string" calcext:value-type="string">
            <text:p>第２弾ブースターパック</text:p>
          </table:table-cell>
          <table:table-cell table:formula="of:=VLOOKUP([.G182];[$収録番号.$A$1:$収録番号.$B$9];2;0)" office:value-type="float" office:value="25" calcext:value-type="float">
            <text:p>25</text:p>
          </table:table-cell>
          <table:table-cell office:value-type="string" calcext:value-type="string">
            <text:p>N</text:p>
          </table:table-cell>
          <table:table-cell table:formula="of:=VLOOKUP([.I182];[$レアリティ番号.$A$1:$レアリティ番号.$B$4];2;0)" office:value-type="float" office:value="1" calcext:value-type="float">
            <text:p>1</text:p>
          </table:table-cell>
          <table:table-cell office:value-type="string" calcext:value-type="string">
            <text:p>ハイケイ</text:p>
          </table:table-cell>
          <table:table-cell table:formula="of:=VLOOKUP([.K182];[$種類番号.$A$1:$種類番号.$B$4];2;0)" office:value-type="float" office:value="2" calcext:value-type="float">
            <text:p>2</text:p>
          </table:table-cell>
          <table:table-cell office:value-type="string" calcext:value-type="string">
            <text:p>赤</text:p>
          </table:table-cell>
          <table:table-cell table:formula="of:=VLOOKUP([.M182];[$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決起</text:p>
          </table:table-cell>
          <table:table-cell table:formula="of:=IFERROR(VLOOKUP([.$Q182];[$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S182];[$特性番号.$A$1:$特性番号.$B$8];2;0);0)" office:value-type="float" office:value="0" calcext:value-type="float">
            <text:p>0</text:p>
          </table:table-cell>
          <table:table-cell office:value-type="string" calcext:value-type="string">
            <text:p>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text:p>
          </table:table-cell>
          <table:table-cell table:style-name="ce8" office:value-type="string" calcext:value-type="string">
            <text:p>魔力化</text:p>
          </table:table-cell>
          <table:table-cell table:formula="of:=IFERROR(VLOOKUP([.$V182];[$遺業能力番号.$A$1:$遺業能力番号.$B$9];2;0);0)" office:value-type="float" office:value="1" calcext:value-type="float">
            <text:p>1</text:p>
          </table:table-cell>
          <table:table-cell office:value-type="string" calcext:value-type="string">
            <text:p>https://one-draw.jp/ijinden/cardlist/002/card/02_049.png</text:p>
          </table:table-cell>
          <table:table-cell table:formula="of:=CONCATENATE([$JSON.$A$1];[.$C182];[$JSON.$B$1];[.$E182];[$JSON.$C$1];[.$F182];[$JSON.$D$1];IF(ISNA([.$S182]);&quot;null&quot;;&quot;&quot;&quot;&quot;&amp;[.$S182]&amp;&quot;&quot;&quot;&quot;);[$JSON.$E$1];[.$U182];[$JSON.$F$1];IF(ISNA([.$V182]);&quot;null&quot;;&quot;&quot;&quot;&quot;&amp;[.$V182]&amp;&quot;&quot;&quot;&quot;);[$JSON.$G$1];[.$X182];[$JSON.$H$1];[.$H182];[$JSON.$I$1];[.J182];[$JSON.$J$1];[.$L182];[$JSON.$K$1];[.$O182];[$JSON.$L$1];[.$N182];[$JSON.$M$1];[.$R182];[$JSON.$N$1];[.$T182];[$JSON.$O$1];[.$W182];[$JSON.$P$1];[.$A182];[$JSON.$Q$1];[.$B182];[$JSON.$R$1])" office:value-type="string" office:string-value="{&quot;id&quot;:&quot;2-49&quot;,&quot;name&quot;:&quot;籠城戦&quot;,&quot;kana&quot;:&quot;ろうじょうせん&quot;,&quot;traitText&quot;:null,&quot;ruleText&quot;:&quot;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quot;,&quot;legacyText&quot;:&quot;魔力化&quot;,&quot;imageUrl&quot;:&quot;https://one-draw.jp/ijinden/cardlist/002/card/02_049.png&quot;,&quot;expansion&quot;:25,&quot;rarity&quot;:1,&quot;type&quot;:2,&quot;level&quot;:2,&quot;color&quot;:1,&quot;term&quot;:4,&quot;trait&quot;:0,&quot;legacy&quot;:1,&quot;orderTable&quot;:181,&quot;orderDeck&quot;:240}," calcext:value-type="string">
            <text:p>{"id":"2-49","name":"籠城戦","kana":"ろうじょうせん","traitText":null,"ruleText":"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legacyText":"魔力化","imageUrl":"https://one-draw.jp/ijinden/cardlist/002/card/02_049.png","expansion":25,"rarity":1,"type":2,"level":2,"color":1,"term":4,"trait":0,"legacy":1,"orderTable":181,"orderDeck":240},</text:p>
          </table:table-cell>
          <table:table-cell table:number-columns-repeated="16347"/>
        </table:table-row>
        <table:table-row table:style-name="ro2">
          <table:table-cell office:value-type="float" office:value="182" calcext:value-type="float">
            <text:p>182</text:p>
          </table:table-cell>
          <table:table-cell office:value-type="float" office:value="266" calcext:value-type="float">
            <text:p>266</text:p>
          </table:table-cell>
          <table:table-cell office:value-type="string" calcext:value-type="string">
            <text:p>2-50</text:p>
          </table:table-cell>
          <table:table-cell office:value-type="float" office:value="50" calcext:value-type="float">
            <text:p>50</text:p>
          </table:table-cell>
          <table:table-cell office:value-type="string" calcext:value-type="string">
            <text:p>安宅船</text:p>
          </table:table-cell>
          <table:table-cell office:value-type="string" calcext:value-type="string">
            <text:p>あたけぶね</text:p>
          </table:table-cell>
          <table:table-cell office:value-type="string" calcext:value-type="string">
            <text:p>第２弾ブースターパック</text:p>
          </table:table-cell>
          <table:table-cell table:formula="of:=VLOOKUP([.G183];[$収録番号.$A$1:$収録番号.$B$9];2;0)" office:value-type="float" office:value="25" calcext:value-type="float">
            <text:p>25</text:p>
          </table:table-cell>
          <table:table-cell office:value-type="string" calcext:value-type="string">
            <text:p>N</text:p>
          </table:table-cell>
          <table:table-cell table:formula="of:=VLOOKUP([.I183];[$レアリティ番号.$A$1:$レアリティ番号.$B$4];2;0)" office:value-type="float" office:value="1" calcext:value-type="float">
            <text:p>1</text:p>
          </table:table-cell>
          <table:table-cell office:value-type="string" calcext:value-type="string">
            <text:p>ハイケイ</text:p>
          </table:table-cell>
          <table:table-cell table:formula="of:=VLOOKUP([.K183];[$種類番号.$A$1:$種類番号.$B$4];2;0)" office:value-type="float" office:value="2" calcext:value-type="float">
            <text:p>2</text:p>
          </table:table-cell>
          <table:table-cell office:value-type="string" calcext:value-type="string">
            <text:p>赤</text:p>
          </table:table-cell>
          <table:table-cell table:formula="of:=VLOOKUP([.M183];[$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3];[$特性番号.$A$1:$特性番号.$B$8];2;0);0)" office:value-type="float" office:value="0" calcext:value-type="float">
            <text:p>0</text:p>
          </table:table-cell>
          <table:table-cell office:value-type="string" calcext:value-type="string">
            <text:p>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text:p>
          </table:table-cell>
          <table:table-cell table:style-name="ce8" table:formula="of:=NA()" office:value-type="string" office:string-value="" calcext:value-type="error">
            <text:p>#N/A</text:p>
          </table:table-cell>
          <table:table-cell table:formula="of:=IFERROR(VLOOKUP([.$V183];[$遺業能力番号.$A$1:$遺業能力番号.$B$9];2;0);0)" office:value-type="float" office:value="0" calcext:value-type="float">
            <text:p>0</text:p>
          </table:table-cell>
          <table:table-cell office:value-type="string" calcext:value-type="string">
            <text:p>https://one-draw.jp/ijinden/cardlist/002/card/02_050.png</text:p>
          </table:table-cell>
          <table:table-cell table:formula="of:=CONCATENATE([$JSON.$A$1];[.$C183];[$JSON.$B$1];[.$E183];[$JSON.$C$1];[.$F183];[$JSON.$D$1];IF(ISNA([.$S183]);&quot;null&quot;;&quot;&quot;&quot;&quot;&amp;[.$S183]&amp;&quot;&quot;&quot;&quot;);[$JSON.$E$1];[.$U183];[$JSON.$F$1];IF(ISNA([.$V183]);&quot;null&quot;;&quot;&quot;&quot;&quot;&amp;[.$V183]&amp;&quot;&quot;&quot;&quot;);[$JSON.$G$1];[.$X183];[$JSON.$H$1];[.$H183];[$JSON.$I$1];[.J183];[$JSON.$J$1];[.$L183];[$JSON.$K$1];[.$O183];[$JSON.$L$1];[.$N183];[$JSON.$M$1];[.$R183];[$JSON.$N$1];[.$T183];[$JSON.$O$1];[.$W183];[$JSON.$P$1];[.$A183];[$JSON.$Q$1];[.$B183];[$JSON.$R$1])" office:value-type="string" office:string-value="{&quot;id&quot;:&quot;2-50&quot;,&quot;name&quot;:&quot;安宅船&quot;,&quot;kana&quot;:&quot;あたけぶね&quot;,&quot;traitText&quot;:null,&quot;ruleText&quot;:&quot;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quot;,&quot;legacyText&quot;:null,&quot;imageUrl&quot;:&quot;https://one-draw.jp/ijinden/cardlist/002/card/02_050.png&quot;,&quot;expansion&quot;:25,&quot;rarity&quot;:1,&quot;type&quot;:2,&quot;level&quot;:5,&quot;color&quot;:1,&quot;term&quot;:0,&quot;trait&quot;:0,&quot;legacy&quot;:0,&quot;orderTable&quot;:182,&quot;orderDeck&quot;:266}," calcext:value-type="string">
            <text:p>{"id":"2-50","name":"安宅船","kana":"あたけぶね","traitText":null,"ruleText":"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legacyText":null,"imageUrl":"https://one-draw.jp/ijinden/cardlist/002/card/02_050.png","expansion":25,"rarity":1,"type":2,"level":5,"color":1,"term":0,"trait":0,"legacy":0,"orderTable":182,"orderDeck":266},</text:p>
          </table:table-cell>
          <table:table-cell table:number-columns-repeated="16347"/>
        </table:table-row>
        <table:table-row table:style-name="ro2">
          <table:table-cell office:value-type="float" office:value="183" calcext:value-type="float">
            <text:p>183</text:p>
          </table:table-cell>
          <table:table-cell office:value-type="float" office:value="261" calcext:value-type="float">
            <text:p>261</text:p>
          </table:table-cell>
          <table:table-cell office:value-type="string" calcext:value-type="string">
            <text:p>2-51</text:p>
          </table:table-cell>
          <table:table-cell office:value-type="float" office:value="51" calcext:value-type="float">
            <text:p>51</text:p>
          </table:table-cell>
          <table:table-cell office:value-type="string" calcext:value-type="string">
            <text:p>リヴァイアサン</text:p>
          </table:table-cell>
          <table:table-cell office:value-type="string" calcext:value-type="string">
            <text:p>りゔぁいあさん</text:p>
          </table:table-cell>
          <table:table-cell office:value-type="string" calcext:value-type="string">
            <text:p>第２弾ブースターパック</text:p>
          </table:table-cell>
          <table:table-cell table:formula="of:=VLOOKUP([.G184];[$収録番号.$A$1:$収録番号.$B$9];2;0)" office:value-type="float" office:value="25" calcext:value-type="float">
            <text:p>25</text:p>
          </table:table-cell>
          <table:table-cell office:value-type="string" calcext:value-type="string">
            <text:p>N</text:p>
          </table:table-cell>
          <table:table-cell table:formula="of:=VLOOKUP([.I184];[$レアリティ番号.$A$1:$レアリティ番号.$B$4];2;0)" office:value-type="float" office:value="1" calcext:value-type="float">
            <text:p>1</text:p>
          </table:table-cell>
          <table:table-cell office:value-type="string" calcext:value-type="string">
            <text:p>ハイケイ</text:p>
          </table:table-cell>
          <table:table-cell table:formula="of:=VLOOKUP([.K184];[$種類番号.$A$1:$種類番号.$B$4];2;0)" office:value-type="float" office:value="2" calcext:value-type="float">
            <text:p>2</text:p>
          </table:table-cell>
          <table:table-cell office:value-type="string" calcext:value-type="string">
            <text:p>青</text:p>
          </table:table-cell>
          <table:table-cell table:formula="of:=VLOOKUP([.M184];[$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4];[$能力語番号.$A$1:$能力語番号.$B$10];2;0);0)" office:value-type="float" office:value="0" calcext:value-type="float">
            <text:p>0</text:p>
          </table:table-cell>
          <table:table-cell office:value-type="string" calcext:value-type="string">
            <text:p>思想</text:p>
          </table:table-cell>
          <table:table-cell table:formula="of:=IFERROR(VLOOKUP([.$S184];[$特性番号.$A$1:$特性番号.$B$8];2;0);0)" office:value-type="float" office:value="8" calcext:value-type="float">
            <text:p>8</text:p>
          </table:table-cell>
          <table:table-cell office:value-type="string" calcext:value-type="string">
            <text:p>相手がアタックしたとき、自分の戦場のイジンをすきなだけ起こして、ガーディアンにする。</text:p>
          </table:table-cell>
          <table:table-cell table:style-name="ce8" office:value-type="string" calcext:value-type="string">
            <text:p>手札に戻す</text:p>
          </table:table-cell>
          <table:table-cell table:formula="of:=IFERROR(VLOOKUP([.$V184];[$遺業能力番号.$A$1:$遺業能力番号.$B$9];2;0);0)" office:value-type="float" office:value="5" calcext:value-type="float">
            <text:p>5</text:p>
          </table:table-cell>
          <table:table-cell office:value-type="string" calcext:value-type="string">
            <text:p>https://one-draw.jp/ijinden/cardlist/002/card/02_051.png</text:p>
          </table:table-cell>
          <table:table-cell table:formula="of:=CONCATENATE([$JSON.$A$1];[.$C184];[$JSON.$B$1];[.$E184];[$JSON.$C$1];[.$F184];[$JSON.$D$1];IF(ISNA([.$S184]);&quot;null&quot;;&quot;&quot;&quot;&quot;&amp;[.$S184]&amp;&quot;&quot;&quot;&quot;);[$JSON.$E$1];[.$U184];[$JSON.$F$1];IF(ISNA([.$V184]);&quot;null&quot;;&quot;&quot;&quot;&quot;&amp;[.$V184]&amp;&quot;&quot;&quot;&quot;);[$JSON.$G$1];[.$X184];[$JSON.$H$1];[.$H184];[$JSON.$I$1];[.J184];[$JSON.$J$1];[.$L184];[$JSON.$K$1];[.$O184];[$JSON.$L$1];[.$N184];[$JSON.$M$1];[.$R184];[$JSON.$N$1];[.$T184];[$JSON.$O$1];[.$W184];[$JSON.$P$1];[.$A184];[$JSON.$Q$1];[.$B184];[$JSON.$R$1])" office:value-type="string" office:string-value="{&quot;id&quot;:&quot;2-51&quot;,&quot;name&quot;:&quot;リヴァイアサン&quot;,&quot;kana&quot;:&quot;りゔぁいあさん&quot;,&quot;traitText&quot;:&quot;思想&quot;,&quot;ruleText&quot;:&quot;相手がアタックしたとき、自分の戦場のイジンをすきなだけ起こして、ガーディアンにする。&quot;,&quot;legacyText&quot;:&quot;手札に戻す&quot;,&quot;imageUrl&quot;:&quot;https://one-draw.jp/ijinden/cardlist/002/card/02_051.png&quot;,&quot;expansion&quot;:25,&quot;rarity&quot;:1,&quot;type&quot;:2,&quot;level&quot;:4,&quot;color&quot;:2,&quot;term&quot;:0,&quot;trait&quot;:8,&quot;legacy&quot;:5,&quot;orderTable&quot;:183,&quot;orderDeck&quot;:261}," calcext:value-type="string">
            <text:p>{"id":"2-51","name":"リヴァイアサン","kana":"りゔぁいあさん","traitText":"思想","ruleText":"相手がアタックしたとき、自分の戦場のイジンをすきなだけ起こして、ガーディアンにする。","legacyText":"手札に戻す","imageUrl":"https://one-draw.jp/ijinden/cardlist/002/card/02_051.png","expansion":25,"rarity":1,"type":2,"level":4,"color":2,"term":0,"trait":8,"legacy":5,"orderTable":183,"orderDeck":261},</text:p>
          </table:table-cell>
          <table:table-cell table:number-columns-repeated="16347"/>
        </table:table-row>
        <table:table-row table:style-name="ro2">
          <table:table-cell office:value-type="float" office:value="184" calcext:value-type="float">
            <text:p>184</text:p>
          </table:table-cell>
          <table:table-cell office:value-type="float" office:value="274" calcext:value-type="float">
            <text:p>274</text:p>
          </table:table-cell>
          <table:table-cell office:value-type="string" calcext:value-type="string">
            <text:p>2-52</text:p>
          </table:table-cell>
          <table:table-cell office:value-type="float" office:value="52" calcext:value-type="float">
            <text:p>52</text:p>
          </table:table-cell>
          <table:table-cell office:value-type="string" calcext:value-type="string">
            <text:p>ガレオン船</text:p>
          </table:table-cell>
          <table:table-cell office:value-type="string" calcext:value-type="string">
            <text:p>がれおんせん</text:p>
          </table:table-cell>
          <table:table-cell office:value-type="string" calcext:value-type="string">
            <text:p>第２弾ブースターパック</text:p>
          </table:table-cell>
          <table:table-cell table:formula="of:=VLOOKUP([.G185];[$収録番号.$A$1:$収録番号.$B$9];2;0)" office:value-type="float" office:value="25" calcext:value-type="float">
            <text:p>25</text:p>
          </table:table-cell>
          <table:table-cell office:value-type="string" calcext:value-type="string">
            <text:p>N</text:p>
          </table:table-cell>
          <table:table-cell table:formula="of:=VLOOKUP([.I185];[$レアリティ番号.$A$1:$レアリティ番号.$B$4];2;0)" office:value-type="float" office:value="1" calcext:value-type="float">
            <text:p>1</text:p>
          </table:table-cell>
          <table:table-cell office:value-type="string" calcext:value-type="string">
            <text:p>ハイケイ</text:p>
          </table:table-cell>
          <table:table-cell table:formula="of:=VLOOKUP([.K185];[$種類番号.$A$1:$種類番号.$B$4];2;0)" office:value-type="float" office:value="2" calcext:value-type="float">
            <text:p>2</text:p>
          </table:table-cell>
          <table:table-cell office:value-type="string" calcext:value-type="string">
            <text:p>青</text:p>
          </table:table-cell>
          <table:table-cell table:formula="of:=VLOOKUP([.M185];[$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5];[$特性番号.$A$1:$特性番号.$B$8];2;0);0)" office:value-type="float" office:value="0" calcext:value-type="float">
            <text:p>0</text:p>
          </table:table-cell>
          <table:table-cell office:value-type="string" calcext:value-type="string">
            <text:p>「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text:p>
          </table:table-cell>
          <table:table-cell table:style-name="ce8" table:formula="of:=NA()" office:value-type="string" office:string-value="" calcext:value-type="error">
            <text:p>#N/A</text:p>
          </table:table-cell>
          <table:table-cell table:formula="of:=IFERROR(VLOOKUP([.$V185];[$遺業能力番号.$A$1:$遺業能力番号.$B$9];2;0);0)" office:value-type="float" office:value="0" calcext:value-type="float">
            <text:p>0</text:p>
          </table:table-cell>
          <table:table-cell office:value-type="string" calcext:value-type="string">
            <text:p>https://one-draw.jp/ijinden/cardlist/002/card/02_052.png</text:p>
          </table:table-cell>
          <table:table-cell table:formula="of:=CONCATENATE([$JSON.$A$1];[.$C185];[$JSON.$B$1];[.$E185];[$JSON.$C$1];[.$F185];[$JSON.$D$1];IF(ISNA([.$S185]);&quot;null&quot;;&quot;&quot;&quot;&quot;&amp;[.$S185]&amp;&quot;&quot;&quot;&quot;);[$JSON.$E$1];[.$U185];[$JSON.$F$1];IF(ISNA([.$V185]);&quot;null&quot;;&quot;&quot;&quot;&quot;&amp;[.$V185]&amp;&quot;&quot;&quot;&quot;);[$JSON.$G$1];[.$X185];[$JSON.$H$1];[.$H185];[$JSON.$I$1];[.J185];[$JSON.$J$1];[.$L185];[$JSON.$K$1];[.$O185];[$JSON.$L$1];[.$N185];[$JSON.$M$1];[.$R185];[$JSON.$N$1];[.$T185];[$JSON.$O$1];[.$W185];[$JSON.$P$1];[.$A185];[$JSON.$Q$1];[.$B185];[$JSON.$R$1])" office:value-type="string" office:string-value="{&quot;id&quot;:&quot;2-52&quot;,&quot;name&quot;:&quot;ガレオン船&quot;,&quot;kana&quot;:&quot;がれおんせん&quot;,&quot;traitText&quot;:null,&quot;ruleText&quot;:&quot;「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quot;,&quot;legacyText&quot;:null,&quot;imageUrl&quot;:&quot;https://one-draw.jp/ijinden/cardlist/002/card/02_052.png&quot;,&quot;expansion&quot;:25,&quot;rarity&quot;:1,&quot;type&quot;:2,&quot;level&quot;:6,&quot;color&quot;:2,&quot;term&quot;:0,&quot;trait&quot;:0,&quot;legacy&quot;:0,&quot;orderTable&quot;:184,&quot;orderDeck&quot;:274}," calcext:value-type="string">
            <text:p>{"id":"2-52","name":"ガレオン船","kana":"がれおんせん","traitText":null,"ruleText":"「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legacyText":null,"imageUrl":"https://one-draw.jp/ijinden/cardlist/002/card/02_052.png","expansion":25,"rarity":1,"type":2,"level":6,"color":2,"term":0,"trait":0,"legacy":0,"orderTable":184,"orderDeck":274},</text:p>
          </table:table-cell>
          <table:table-cell table:number-columns-repeated="16347"/>
        </table:table-row>
        <table:table-row table:style-name="ro2">
          <table:table-cell office:value-type="float" office:value="185" calcext:value-type="float">
            <text:p>185</text:p>
          </table:table-cell>
          <table:table-cell office:value-type="float" office:value="244" calcext:value-type="float">
            <text:p>244</text:p>
          </table:table-cell>
          <table:table-cell office:value-type="string" calcext:value-type="string">
            <text:p>2-53</text:p>
          </table:table-cell>
          <table:table-cell office:value-type="float" office:value="53" calcext:value-type="float">
            <text:p>53</text:p>
          </table:table-cell>
          <table:table-cell office:value-type="string" calcext:value-type="string">
            <text:p>仁王</text:p>
          </table:table-cell>
          <table:table-cell office:value-type="string" calcext:value-type="string">
            <text:p>におう</text:p>
          </table:table-cell>
          <table:table-cell office:value-type="string" calcext:value-type="string">
            <text:p>第２弾ブースターパック</text:p>
          </table:table-cell>
          <table:table-cell table:formula="of:=VLOOKUP([.G186];[$収録番号.$A$1:$収録番号.$B$9];2;0)" office:value-type="float" office:value="25" calcext:value-type="float">
            <text:p>25</text:p>
          </table:table-cell>
          <table:table-cell office:value-type="string" calcext:value-type="string">
            <text:p>N</text:p>
          </table:table-cell>
          <table:table-cell table:formula="of:=VLOOKUP([.I186];[$レアリティ番号.$A$1:$レアリティ番号.$B$4];2;0)" office:value-type="float" office:value="1" calcext:value-type="float">
            <text:p>1</text:p>
          </table:table-cell>
          <table:table-cell office:value-type="string" calcext:value-type="string">
            <text:p>ハイケイ</text:p>
          </table:table-cell>
          <table:table-cell table:formula="of:=VLOOKUP([.K186];[$種類番号.$A$1:$種類番号.$B$4];2;0)" office:value-type="float" office:value="2" calcext:value-type="float">
            <text:p>2</text:p>
          </table:table-cell>
          <table:table-cell office:value-type="string" calcext:value-type="string">
            <text:p>緑</text:p>
          </table:table-cell>
          <table:table-cell table:formula="of:=VLOOKUP([.M186];[$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6];[$特性番号.$A$1:$特性番号.$B$8];2;0);0)" office:value-type="float" office:value="0" calcext:value-type="float">
            <text:p>0</text:p>
          </table:table-cell>
          <table:table-cell office:value-type="string" calcext:value-type="string">
            <text:p>能力によってこれを数える際、1つでなく2つと数える。¶イジンが自分の戦場に、ちょうど2体いる間、自分の戦場のイジンは「ウォッチャー」を得る。</text:p>
          </table:table-cell>
          <table:table-cell table:style-name="ce8" office:value-type="string" calcext:value-type="string">
            <text:p>魔力化</text:p>
          </table:table-cell>
          <table:table-cell table:formula="of:=IFERROR(VLOOKUP([.$V186];[$遺業能力番号.$A$1:$遺業能力番号.$B$9];2;0);0)" office:value-type="float" office:value="1" calcext:value-type="float">
            <text:p>1</text:p>
          </table:table-cell>
          <table:table-cell office:value-type="string" calcext:value-type="string">
            <text:p>https://one-draw.jp/ijinden/cardlist/002/card/02_053.png</text:p>
          </table:table-cell>
          <table:table-cell table:formula="of:=CONCATENATE([$JSON.$A$1];[.$C186];[$JSON.$B$1];[.$E186];[$JSON.$C$1];[.$F186];[$JSON.$D$1];IF(ISNA([.$S186]);&quot;null&quot;;&quot;&quot;&quot;&quot;&amp;[.$S186]&amp;&quot;&quot;&quot;&quot;);[$JSON.$E$1];[.$U186];[$JSON.$F$1];IF(ISNA([.$V186]);&quot;null&quot;;&quot;&quot;&quot;&quot;&amp;[.$V186]&amp;&quot;&quot;&quot;&quot;);[$JSON.$G$1];[.$X186];[$JSON.$H$1];[.$H186];[$JSON.$I$1];[.J186];[$JSON.$J$1];[.$L186];[$JSON.$K$1];[.$O186];[$JSON.$L$1];[.$N186];[$JSON.$M$1];[.$R186];[$JSON.$N$1];[.$T186];[$JSON.$O$1];[.$W186];[$JSON.$P$1];[.$A186];[$JSON.$Q$1];[.$B186];[$JSON.$R$1])" office:value-type="string" office:string-value="{&quot;id&quot;:&quot;2-53&quot;,&quot;name&quot;:&quot;仁王&quot;,&quot;kana&quot;:&quot;におう&quot;,&quot;traitText&quot;:null,&quot;ruleText&quot;:&quot;能力によってこれを数える際、1つでなく2つと数える。¶イジンが自分の戦場に、ちょうど2体いる間、自分の戦場のイジンは「ウォッチャー」を得る。&quot;,&quot;legacyText&quot;:&quot;魔力化&quot;,&quot;imageUrl&quot;:&quot;https://one-draw.jp/ijinden/cardlist/002/card/02_053.png&quot;,&quot;expansion&quot;:25,&quot;rarity&quot;:1,&quot;type&quot;:2,&quot;level&quot;:2,&quot;color&quot;:4,&quot;term&quot;:0,&quot;trait&quot;:0,&quot;legacy&quot;:1,&quot;orderTable&quot;:185,&quot;orderDeck&quot;:244}," calcext:value-type="string">
            <text:p>{"id":"2-53","name":"仁王","kana":"におう","traitText":null,"ruleText":"能力によってこれを数える際、1つでなく2つと数える。¶イジンが自分の戦場に、ちょうど2体いる間、自分の戦場のイジンは「ウォッチャー」を得る。","legacyText":"魔力化","imageUrl":"https://one-draw.jp/ijinden/cardlist/002/card/02_053.png","expansion":25,"rarity":1,"type":2,"level":2,"color":4,"term":0,"trait":0,"legacy":1,"orderTable":185,"orderDeck":244},</text:p>
          </table:table-cell>
          <table:table-cell table:number-columns-repeated="16347"/>
        </table:table-row>
        <table:table-row table:style-name="ro2">
          <table:table-cell office:value-type="float" office:value="186" calcext:value-type="float">
            <text:p>186</text:p>
          </table:table-cell>
          <table:table-cell office:value-type="float" office:value="279" calcext:value-type="float">
            <text:p>279</text:p>
          </table:table-cell>
          <table:table-cell office:value-type="string" calcext:value-type="string">
            <text:p>2-54</text:p>
          </table:table-cell>
          <table:table-cell office:value-type="float" office:value="54" calcext:value-type="float">
            <text:p>54</text:p>
          </table:table-cell>
          <table:table-cell office:value-type="string" calcext:value-type="string">
            <text:p>蒸気機関車</text:p>
          </table:table-cell>
          <table:table-cell office:value-type="string" calcext:value-type="string">
            <text:p>じょうききかんしゃ</text:p>
          </table:table-cell>
          <table:table-cell office:value-type="string" calcext:value-type="string">
            <text:p>第２弾ブースターパック</text:p>
          </table:table-cell>
          <table:table-cell table:formula="of:=VLOOKUP([.G187];[$収録番号.$A$1:$収録番号.$B$9];2;0)" office:value-type="float" office:value="25" calcext:value-type="float">
            <text:p>25</text:p>
          </table:table-cell>
          <table:table-cell office:value-type="string" calcext:value-type="string">
            <text:p>N</text:p>
          </table:table-cell>
          <table:table-cell table:formula="of:=VLOOKUP([.I187];[$レアリティ番号.$A$1:$レアリティ番号.$B$4];2;0)" office:value-type="float" office:value="1" calcext:value-type="float">
            <text:p>1</text:p>
          </table:table-cell>
          <table:table-cell office:value-type="string" calcext:value-type="string">
            <text:p>ハイケイ</text:p>
          </table:table-cell>
          <table:table-cell table:formula="of:=VLOOKUP([.K187];[$種類番号.$A$1:$種類番号.$B$4];2;0)" office:value-type="float" office:value="2" calcext:value-type="float">
            <text:p>2</text:p>
          </table:table-cell>
          <table:table-cell office:value-type="string" calcext:value-type="string">
            <text:p>緑</text:p>
          </table:table-cell>
          <table:table-cell table:formula="of:=VLOOKUP([.M187];[$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7];[$特性番号.$A$1:$特性番号.$B$8];2;0);0)" office:value-type="float" office:value="0" calcext:value-type="float">
            <text:p>0</text:p>
          </table:table-cell>
          <table:table-cell office:value-type="string" calcext:value-type="string">
            <text:p>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text:p>
          </table:table-cell>
          <table:table-cell table:style-name="ce8" table:formula="of:=NA()" office:value-type="string" office:string-value="" calcext:value-type="error">
            <text:p>#N/A</text:p>
          </table:table-cell>
          <table:table-cell table:formula="of:=IFERROR(VLOOKUP([.$V187];[$遺業能力番号.$A$1:$遺業能力番号.$B$9];2;0);0)" office:value-type="float" office:value="0" calcext:value-type="float">
            <text:p>0</text:p>
          </table:table-cell>
          <table:table-cell office:value-type="string" calcext:value-type="string">
            <text:p>https://one-draw.jp/ijinden/cardlist/002/card/02_054.png</text:p>
          </table:table-cell>
          <table:table-cell table:formula="of:=CONCATENATE([$JSON.$A$1];[.$C187];[$JSON.$B$1];[.$E187];[$JSON.$C$1];[.$F187];[$JSON.$D$1];IF(ISNA([.$S187]);&quot;null&quot;;&quot;&quot;&quot;&quot;&amp;[.$S187]&amp;&quot;&quot;&quot;&quot;);[$JSON.$E$1];[.$U187];[$JSON.$F$1];IF(ISNA([.$V187]);&quot;null&quot;;&quot;&quot;&quot;&quot;&amp;[.$V187]&amp;&quot;&quot;&quot;&quot;);[$JSON.$G$1];[.$X187];[$JSON.$H$1];[.$H187];[$JSON.$I$1];[.J187];[$JSON.$J$1];[.$L187];[$JSON.$K$1];[.$O187];[$JSON.$L$1];[.$N187];[$JSON.$M$1];[.$R187];[$JSON.$N$1];[.$T187];[$JSON.$O$1];[.$W187];[$JSON.$P$1];[.$A187];[$JSON.$Q$1];[.$B187];[$JSON.$R$1])" office:value-type="string" office:string-value="{&quot;id&quot;:&quot;2-54&quot;,&quot;name&quot;:&quot;蒸気機関車&quot;,&quot;kana&quot;:&quot;じょうききかんしゃ&quot;,&quot;traitText&quot;:null,&quot;ruleText&quot;:&quot;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quot;,&quot;legacyText&quot;:null,&quot;imageUrl&quot;:&quot;https://one-draw.jp/ijinden/cardlist/002/card/02_054.png&quot;,&quot;expansion&quot;:25,&quot;rarity&quot;:1,&quot;type&quot;:2,&quot;level&quot;:7,&quot;color&quot;:4,&quot;term&quot;:0,&quot;trait&quot;:0,&quot;legacy&quot;:0,&quot;orderTable&quot;:186,&quot;orderDeck&quot;:279}," calcext:value-type="string">
            <text:p>{"id":"2-54","name":"蒸気機関車","kana":"じょうききかんしゃ","traitText":null,"ruleText":"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legacyText":null,"imageUrl":"https://one-draw.jp/ijinden/cardlist/002/card/02_054.png","expansion":25,"rarity":1,"type":2,"level":7,"color":4,"term":0,"trait":0,"legacy":0,"orderTable":186,"orderDeck":279},</text:p>
          </table:table-cell>
          <table:table-cell table:number-columns-repeated="16347"/>
        </table:table-row>
        <table:table-row table:style-name="ro2">
          <table:table-cell office:value-type="float" office:value="187" calcext:value-type="float">
            <text:p>187</text:p>
          </table:table-cell>
          <table:table-cell office:value-type="float" office:value="246" calcext:value-type="float">
            <text:p>246</text:p>
          </table:table-cell>
          <table:table-cell office:value-type="string" calcext:value-type="string">
            <text:p>2-55</text:p>
          </table:table-cell>
          <table:table-cell office:value-type="float" office:value="55" calcext:value-type="float">
            <text:p>55</text:p>
          </table:table-cell>
          <table:table-cell office:value-type="string" calcext:value-type="string">
            <text:p>凱旋門</text:p>
          </table:table-cell>
          <table:table-cell office:value-type="string" calcext:value-type="string">
            <text:p>がいせんもん</text:p>
          </table:table-cell>
          <table:table-cell office:value-type="string" calcext:value-type="string">
            <text:p>第２弾ブースターパック</text:p>
          </table:table-cell>
          <table:table-cell table:formula="of:=VLOOKUP([.G188];[$収録番号.$A$1:$収録番号.$B$9];2;0)" office:value-type="float" office:value="25" calcext:value-type="float">
            <text:p>25</text:p>
          </table:table-cell>
          <table:table-cell office:value-type="string" calcext:value-type="string">
            <text:p>N</text:p>
          </table:table-cell>
          <table:table-cell table:formula="of:=VLOOKUP([.I188];[$レアリティ番号.$A$1:$レアリティ番号.$B$4];2;0)" office:value-type="float" office:value="1" calcext:value-type="float">
            <text:p>1</text:p>
          </table:table-cell>
          <table:table-cell office:value-type="string" calcext:value-type="string">
            <text:p>ハイケイ</text:p>
          </table:table-cell>
          <table:table-cell table:formula="of:=VLOOKUP([.K188];[$種類番号.$A$1:$種類番号.$B$4];2;0)" office:value-type="float" office:value="2" calcext:value-type="float">
            <text:p>2</text:p>
          </table:table-cell>
          <table:table-cell office:value-type="string" calcext:value-type="string">
            <text:p>黄</text:p>
          </table:table-cell>
          <table:table-cell table:formula="of:=VLOOKUP([.M188];[$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8];[$特性番号.$A$1:$特性番号.$B$8];2;0);0)" office:value-type="float" office:value="0" calcext:value-type="float">
            <text:p>0</text:p>
          </table:table-cell>
          <table:table-cell office:value-type="string" calcext:value-type="string">
            <text:p>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text:p>
          </table:table-cell>
          <table:table-cell table:style-name="ce8" office:value-type="string" calcext:value-type="string">
            <text:p>山札の上か下に戻す</text:p>
          </table:table-cell>
          <table:table-cell table:formula="of:=IFERROR(VLOOKUP([.$V188];[$遺業能力番号.$A$1:$遺業能力番号.$B$9];2;0);0)" office:value-type="float" office:value="7" calcext:value-type="float">
            <text:p>7</text:p>
          </table:table-cell>
          <table:table-cell office:value-type="string" calcext:value-type="string">
            <text:p>https://one-draw.jp/ijinden/cardlist/002/card/02_055.png</text:p>
          </table:table-cell>
          <table:table-cell table:formula="of:=CONCATENATE([$JSON.$A$1];[.$C188];[$JSON.$B$1];[.$E188];[$JSON.$C$1];[.$F188];[$JSON.$D$1];IF(ISNA([.$S188]);&quot;null&quot;;&quot;&quot;&quot;&quot;&amp;[.$S188]&amp;&quot;&quot;&quot;&quot;);[$JSON.$E$1];[.$U188];[$JSON.$F$1];IF(ISNA([.$V188]);&quot;null&quot;;&quot;&quot;&quot;&quot;&amp;[.$V188]&amp;&quot;&quot;&quot;&quot;);[$JSON.$G$1];[.$X188];[$JSON.$H$1];[.$H188];[$JSON.$I$1];[.J188];[$JSON.$J$1];[.$L188];[$JSON.$K$1];[.$O188];[$JSON.$L$1];[.$N188];[$JSON.$M$1];[.$R188];[$JSON.$N$1];[.$T188];[$JSON.$O$1];[.$W188];[$JSON.$P$1];[.$A188];[$JSON.$Q$1];[.$B188];[$JSON.$R$1])" office:value-type="string" office:string-value="{&quot;id&quot;:&quot;2-55&quot;,&quot;name&quot;:&quot;凱旋門&quot;,&quot;kana&quot;:&quot;がいせんもん&quot;,&quot;traitText&quot;:null,&quot;ruleText&quot;:&quot;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quot;,&quot;legacyText&quot;:&quot;山札の上か下に戻す&quot;,&quot;imageUrl&quot;:&quot;https://one-draw.jp/ijinden/cardlist/002/card/02_055.png&quot;,&quot;expansion&quot;:25,&quot;rarity&quot;:1,&quot;type&quot;:2,&quot;level&quot;:2,&quot;color&quot;:8,&quot;term&quot;:0,&quot;trait&quot;:0,&quot;legacy&quot;:7,&quot;orderTable&quot;:187,&quot;orderDeck&quot;:246}," calcext:value-type="string">
            <text:p>{"id":"2-55","name":"凱旋門","kana":"がいせんもん","traitText":null,"ruleText":"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legacyText":"山札の上か下に戻す","imageUrl":"https://one-draw.jp/ijinden/cardlist/002/card/02_055.png","expansion":25,"rarity":1,"type":2,"level":2,"color":8,"term":0,"trait":0,"legacy":7,"orderTable":187,"orderDeck":246},</text:p>
          </table:table-cell>
          <table:table-cell table:number-columns-repeated="16347"/>
        </table:table-row>
        <table:table-row table:style-name="ro2">
          <table:table-cell office:value-type="float" office:value="188" calcext:value-type="float">
            <text:p>188</text:p>
          </table:table-cell>
          <table:table-cell office:value-type="float" office:value="256" calcext:value-type="float">
            <text:p>256</text:p>
          </table:table-cell>
          <table:table-cell office:value-type="string" calcext:value-type="string">
            <text:p>2-56</text:p>
          </table:table-cell>
          <table:table-cell office:value-type="float" office:value="56" calcext:value-type="float">
            <text:p>56</text:p>
          </table:table-cell>
          <table:table-cell office:value-type="string" calcext:value-type="string">
            <text:p>三層の舎利殿</text:p>
          </table:table-cell>
          <table:table-cell office:value-type="string" calcext:value-type="string">
            <text:p>さんそうのしゃりでん</text:p>
          </table:table-cell>
          <table:table-cell office:value-type="string" calcext:value-type="string">
            <text:p>第２弾ブースターパック</text:p>
          </table:table-cell>
          <table:table-cell table:formula="of:=VLOOKUP([.G189];[$収録番号.$A$1:$収録番号.$B$9];2;0)" office:value-type="float" office:value="25" calcext:value-type="float">
            <text:p>25</text:p>
          </table:table-cell>
          <table:table-cell office:value-type="string" calcext:value-type="string">
            <text:p>N</text:p>
          </table:table-cell>
          <table:table-cell table:formula="of:=VLOOKUP([.I189];[$レアリティ番号.$A$1:$レアリティ番号.$B$4];2;0)" office:value-type="float" office:value="1" calcext:value-type="float">
            <text:p>1</text:p>
          </table:table-cell>
          <table:table-cell office:value-type="string" calcext:value-type="string">
            <text:p>ハイケイ</text:p>
          </table:table-cell>
          <table:table-cell table:formula="of:=VLOOKUP([.K189];[$種類番号.$A$1:$種類番号.$B$4];2;0)" office:value-type="float" office:value="2" calcext:value-type="float">
            <text:p>2</text:p>
          </table:table-cell>
          <table:table-cell office:value-type="string" calcext:value-type="string">
            <text:p>黄</text:p>
          </table:table-cell>
          <table:table-cell table:formula="of:=VLOOKUP([.M189];[$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9];[$特性番号.$A$1:$特性番号.$B$8];2;0);0)" office:value-type="float" office:value="0" calcext:value-type="float">
            <text:p>0</text:p>
          </table:table-cell>
          <table:table-cell office:value-type="string" calcext:value-type="string">
            <text:p>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text:p>
          </table:table-cell>
          <table:table-cell table:style-name="ce8" office:value-type="string" calcext:value-type="string">
            <text:p>山札の上か下に戻す</text:p>
          </table:table-cell>
          <table:table-cell table:formula="of:=IFERROR(VLOOKUP([.$V189];[$遺業能力番号.$A$1:$遺業能力番号.$B$9];2;0);0)" office:value-type="float" office:value="7" calcext:value-type="float">
            <text:p>7</text:p>
          </table:table-cell>
          <table:table-cell office:value-type="string" calcext:value-type="string">
            <text:p>https://one-draw.jp/ijinden/cardlist/002/card/02_056.png</text:p>
          </table:table-cell>
          <table:table-cell table:formula="of:=CONCATENATE([$JSON.$A$1];[.$C189];[$JSON.$B$1];[.$E189];[$JSON.$C$1];[.$F189];[$JSON.$D$1];IF(ISNA([.$S189]);&quot;null&quot;;&quot;&quot;&quot;&quot;&amp;[.$S189]&amp;&quot;&quot;&quot;&quot;);[$JSON.$E$1];[.$U189];[$JSON.$F$1];IF(ISNA([.$V189]);&quot;null&quot;;&quot;&quot;&quot;&quot;&amp;[.$V189]&amp;&quot;&quot;&quot;&quot;);[$JSON.$G$1];[.$X189];[$JSON.$H$1];[.$H189];[$JSON.$I$1];[.J189];[$JSON.$J$1];[.$L189];[$JSON.$K$1];[.$O189];[$JSON.$L$1];[.$N189];[$JSON.$M$1];[.$R189];[$JSON.$N$1];[.$T189];[$JSON.$O$1];[.$W189];[$JSON.$P$1];[.$A189];[$JSON.$Q$1];[.$B189];[$JSON.$R$1])" office:value-type="string" office:string-value="{&quot;id&quot;:&quot;2-56&quot;,&quot;name&quot;:&quot;三層の舎利殿&quot;,&quot;kana&quot;:&quot;さんそうのしゃりでん&quot;,&quot;traitText&quot;:null,&quot;ruleText&quot;:&quot;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quot;,&quot;legacyText&quot;:&quot;山札の上か下に戻す&quot;,&quot;imageUrl&quot;:&quot;https://one-draw.jp/ijinden/cardlist/002/card/02_056.png&quot;,&quot;expansion&quot;:25,&quot;rarity&quot;:1,&quot;type&quot;:2,&quot;level&quot;:3,&quot;color&quot;:8,&quot;term&quot;:0,&quot;trait&quot;:0,&quot;legacy&quot;:7,&quot;orderTable&quot;:188,&quot;orderDeck&quot;:256}," calcext:value-type="string">
            <text:p>{"id":"2-56","name":"三層の舎利殿","kana":"さんそうのしゃりでん","traitText":null,"ruleText":"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legacyText":"山札の上か下に戻す","imageUrl":"https://one-draw.jp/ijinden/cardlist/002/card/02_056.png","expansion":25,"rarity":1,"type":2,"level":3,"color":8,"term":0,"trait":0,"legacy":7,"orderTable":188,"orderDeck":256},</text:p>
          </table:table-cell>
          <table:table-cell table:number-columns-repeated="16347"/>
        </table:table-row>
        <table:table-row table:style-name="ro2">
          <table:table-cell office:value-type="float" office:value="189" calcext:value-type="float">
            <text:p>189</text:p>
          </table:table-cell>
          <table:table-cell office:value-type="float" office:value="334" calcext:value-type="float">
            <text:p>334</text:p>
          </table:table-cell>
          <table:table-cell office:value-type="string" calcext:value-type="string">
            <text:p>2-57</text:p>
          </table:table-cell>
          <table:table-cell office:value-type="float" office:value="57" calcext:value-type="float">
            <text:p>57</text:p>
          </table:table-cell>
          <table:table-cell office:value-type="string" calcext:value-type="string">
            <text:p>スペクター</text:p>
          </table:table-cell>
          <table:table-cell office:value-type="string" calcext:value-type="string">
            <text:p>すぺくたー</text:p>
          </table:table-cell>
          <table:table-cell office:value-type="string" calcext:value-type="string">
            <text:p>第２弾ブースターパック</text:p>
          </table:table-cell>
          <table:table-cell table:formula="of:=VLOOKUP([.G190];[$収録番号.$A$1:$収録番号.$B$9];2;0)" office:value-type="float" office:value="25" calcext:value-type="float">
            <text:p>25</text:p>
          </table:table-cell>
          <table:table-cell office:value-type="string" calcext:value-type="string">
            <text:p>N</text:p>
          </table:table-cell>
          <table:table-cell table:formula="of:=VLOOKUP([.I190];[$レアリティ番号.$A$1:$レアリティ番号.$B$4];2;0)" office:value-type="float" office:value="1" calcext:value-type="float">
            <text:p>1</text:p>
          </table:table-cell>
          <table:table-cell office:value-type="string" calcext:value-type="string">
            <text:p>マホウ</text:p>
          </table:table-cell>
          <table:table-cell table:formula="of:=VLOOKUP([.K190];[$種類番号.$A$1:$種類番号.$B$4];2;0)" office:value-type="float" office:value="3" calcext:value-type="float">
            <text:p>3</text:p>
          </table:table-cell>
          <table:table-cell office:value-type="string" calcext:value-type="string">
            <text:p>赤</text:p>
          </table:table-cell>
          <table:table-cell table:formula="of:=VLOOKUP([.M190];[$色番号.$A$1:$色番号.$B$10];2;0)"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黄魔導</text:p>
          </table:table-cell>
          <table:table-cell table:formula="of:=IFERROR(VLOOKUP([.$Q190];[$能力語番号.$A$1:$能力語番号.$B$10];2;0);0)" office:value-type="float" office:value="272" calcext:value-type="float">
            <text:p>272</text:p>
          </table:table-cell>
          <table:table-cell table:formula="of:=NA()" office:value-type="string" office:string-value="" calcext:value-type="error">
            <text:p>#N/A</text:p>
          </table:table-cell>
          <table:table-cell table:formula="of:=IFERROR(VLOOKUP([.$S190];[$特性番号.$A$1:$特性番号.$B$8];2;0);0)" office:value-type="float" office:value="0" calcext:value-type="float">
            <text:p>0</text:p>
          </table:table-cell>
          <table:table-cell office:value-type="string" calcext:value-type="string">
            <text:p>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text:p>
          </table:table-cell>
          <table:table-cell table:style-name="ce8" table:formula="of:=NA()" office:value-type="string" office:string-value="" calcext:value-type="error">
            <text:p>#N/A</text:p>
          </table:table-cell>
          <table:table-cell table:formula="of:=IFERROR(VLOOKUP([.$V190];[$遺業能力番号.$A$1:$遺業能力番号.$B$9];2;0);0)" office:value-type="float" office:value="0" calcext:value-type="float">
            <text:p>0</text:p>
          </table:table-cell>
          <table:table-cell office:value-type="string" calcext:value-type="string">
            <text:p>https://one-draw.jp/ijinden/cardlist/002/card/02_057.png</text:p>
          </table:table-cell>
          <table:table-cell table:formula="of:=CONCATENATE([$JSON.$A$1];[.$C190];[$JSON.$B$1];[.$E190];[$JSON.$C$1];[.$F190];[$JSON.$D$1];IF(ISNA([.$S190]);&quot;null&quot;;&quot;&quot;&quot;&quot;&amp;[.$S190]&amp;&quot;&quot;&quot;&quot;);[$JSON.$E$1];[.$U190];[$JSON.$F$1];IF(ISNA([.$V190]);&quot;null&quot;;&quot;&quot;&quot;&quot;&amp;[.$V190]&amp;&quot;&quot;&quot;&quot;);[$JSON.$G$1];[.$X190];[$JSON.$H$1];[.$H190];[$JSON.$I$1];[.J190];[$JSON.$J$1];[.$L190];[$JSON.$K$1];[.$O190];[$JSON.$L$1];[.$N190];[$JSON.$M$1];[.$R190];[$JSON.$N$1];[.$T190];[$JSON.$O$1];[.$W190];[$JSON.$P$1];[.$A190];[$JSON.$Q$1];[.$B190];[$JSON.$R$1])" office:value-type="string" office:string-value="{&quot;id&quot;:&quot;2-57&quot;,&quot;name&quot;:&quot;スペクター&quot;,&quot;kana&quot;:&quot;すぺくたー&quot;,&quot;traitText&quot;:null,&quot;ruleText&quot;:&quot;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quot;,&quot;legacyText&quot;:null,&quot;imageUrl&quot;:&quot;https://one-draw.jp/ijinden/cardlist/002/card/02_057.png&quot;,&quot;expansion&quot;:25,&quot;rarity&quot;:1,&quot;type&quot;:3,&quot;level&quot;:7,&quot;color&quot;:1,&quot;term&quot;:272,&quot;trait&quot;:0,&quot;legacy&quot;:0,&quot;orderTable&quot;:189,&quot;orderDeck&quot;:334}," calcext:value-type="string">
            <text:p>{"id":"2-57","name":"スペクター","kana":"すぺくたー","traitText":null,"ruleText":"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legacyText":null,"imageUrl":"https://one-draw.jp/ijinden/cardlist/002/card/02_057.png","expansion":25,"rarity":1,"type":3,"level":7,"color":1,"term":272,"trait":0,"legacy":0,"orderTable":189,"orderDeck":334},</text:p>
          </table:table-cell>
          <table:table-cell table:number-columns-repeated="16347"/>
        </table:table-row>
        <table:table-row table:style-name="ro2">
          <table:table-cell office:value-type="float" office:value="190" calcext:value-type="float">
            <text:p>190</text:p>
          </table:table-cell>
          <table:table-cell office:value-type="float" office:value="292" calcext:value-type="float">
            <text:p>292</text:p>
          </table:table-cell>
          <table:table-cell office:value-type="string" calcext:value-type="string">
            <text:p>2-58</text:p>
          </table:table-cell>
          <table:table-cell office:value-type="float" office:value="58" calcext:value-type="float">
            <text:p>58</text:p>
          </table:table-cell>
          <table:table-cell office:value-type="string" calcext:value-type="string">
            <text:p>クイック</text:p>
          </table:table-cell>
          <table:table-cell office:value-type="string" calcext:value-type="string">
            <text:p>くいっく</text:p>
          </table:table-cell>
          <table:table-cell office:value-type="string" calcext:value-type="string">
            <text:p>第２弾ブースターパック</text:p>
          </table:table-cell>
          <table:table-cell table:formula="of:=VLOOKUP([.G191];[$収録番号.$A$1:$収録番号.$B$9];2;0)" office:value-type="float" office:value="25" calcext:value-type="float">
            <text:p>25</text:p>
          </table:table-cell>
          <table:table-cell office:value-type="string" calcext:value-type="string">
            <text:p>N</text:p>
          </table:table-cell>
          <table:table-cell table:formula="of:=VLOOKUP([.I191];[$レアリティ番号.$A$1:$レアリティ番号.$B$4];2;0)" office:value-type="float" office:value="1" calcext:value-type="float">
            <text:p>1</text:p>
          </table:table-cell>
          <table:table-cell office:value-type="string" calcext:value-type="string">
            <text:p>マホウ</text:p>
          </table:table-cell>
          <table:table-cell table:formula="of:=VLOOKUP([.K191];[$種類番号.$A$1:$種類番号.$B$4];2;0)" office:value-type="float" office:value="3" calcext:value-type="float">
            <text:p>3</text:p>
          </table:table-cell>
          <table:table-cell office:value-type="string" calcext:value-type="string">
            <text:p>赤</text:p>
          </table:table-cell>
          <table:table-cell table:formula="of:=VLOOKUP([.M191];[$色番号.$A$1:$色番号.$B$10];2;0)"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9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1];[$特性番号.$A$1:$特性番号.$B$8];2;0);0)" office:value-type="float" office:value="0" calcext:value-type="float">
            <text:p>0</text:p>
          </table:table-cell>
          <table:table-cell office:value-type="string" calcext:value-type="string">
            <text:p>自分の戦場のレベル5以下のイジン1体を指定して発動できる。このターンの間、そのイジンは「即応」を得る。</text:p>
          </table:table-cell>
          <table:table-cell table:style-name="ce8" table:formula="of:=NA()" office:value-type="string" office:string-value="" calcext:value-type="error">
            <text:p>#N/A</text:p>
          </table:table-cell>
          <table:table-cell table:formula="of:=IFERROR(VLOOKUP([.$V191];[$遺業能力番号.$A$1:$遺業能力番号.$B$9];2;0);0)" office:value-type="float" office:value="0" calcext:value-type="float">
            <text:p>0</text:p>
          </table:table-cell>
          <table:table-cell office:value-type="string" calcext:value-type="string">
            <text:p>https://one-draw.jp/ijinden/cardlist/002/card/02_058.png</text:p>
          </table:table-cell>
          <table:table-cell table:formula="of:=CONCATENATE([$JSON.$A$1];[.$C191];[$JSON.$B$1];[.$E191];[$JSON.$C$1];[.$F191];[$JSON.$D$1];IF(ISNA([.$S191]);&quot;null&quot;;&quot;&quot;&quot;&quot;&amp;[.$S191]&amp;&quot;&quot;&quot;&quot;);[$JSON.$E$1];[.$U191];[$JSON.$F$1];IF(ISNA([.$V191]);&quot;null&quot;;&quot;&quot;&quot;&quot;&amp;[.$V191]&amp;&quot;&quot;&quot;&quot;);[$JSON.$G$1];[.$X191];[$JSON.$H$1];[.$H191];[$JSON.$I$1];[.J191];[$JSON.$J$1];[.$L191];[$JSON.$K$1];[.$O191];[$JSON.$L$1];[.$N191];[$JSON.$M$1];[.$R191];[$JSON.$N$1];[.$T191];[$JSON.$O$1];[.$W191];[$JSON.$P$1];[.$A191];[$JSON.$Q$1];[.$B191];[$JSON.$R$1])" office:value-type="string" office:string-value="{&quot;id&quot;:&quot;2-58&quot;,&quot;name&quot;:&quot;クイック&quot;,&quot;kana&quot;:&quot;くいっく&quot;,&quot;traitText&quot;:null,&quot;ruleText&quot;:&quot;自分の戦場のレベル5以下のイジン1体を指定して発動できる。このターンの間、そのイジンは「即応」を得る。&quot;,&quot;legacyText&quot;:null,&quot;imageUrl&quot;:&quot;https://one-draw.jp/ijinden/cardlist/002/card/02_058.png&quot;,&quot;expansion&quot;:25,&quot;rarity&quot;:1,&quot;type&quot;:3,&quot;level&quot;:2,&quot;color&quot;:1,&quot;term&quot;:0,&quot;trait&quot;:0,&quot;legacy&quot;:0,&quot;orderTable&quot;:190,&quot;orderDeck&quot;:292}," calcext:value-type="string">
            <text:p>{"id":"2-58","name":"クイック","kana":"くいっく","traitText":null,"ruleText":"自分の戦場のレベル5以下のイジン1体を指定して発動できる。このターンの間、そのイジンは「即応」を得る。","legacyText":null,"imageUrl":"https://one-draw.jp/ijinden/cardlist/002/card/02_058.png","expansion":25,"rarity":1,"type":3,"level":2,"color":1,"term":0,"trait":0,"legacy":0,"orderTable":190,"orderDeck":292},</text:p>
          </table:table-cell>
          <table:table-cell table:number-columns-repeated="16347"/>
        </table:table-row>
        <table:table-row table:style-name="ro2">
          <table:table-cell office:value-type="float" office:value="191" calcext:value-type="float">
            <text:p>191</text:p>
          </table:table-cell>
          <table:table-cell office:value-type="float" office:value="306" calcext:value-type="float">
            <text:p>306</text:p>
          </table:table-cell>
          <table:table-cell office:value-type="string" calcext:value-type="string">
            <text:p>2-59</text:p>
          </table:table-cell>
          <table:table-cell office:value-type="float" office:value="59" calcext:value-type="float">
            <text:p>59</text:p>
          </table:table-cell>
          <table:table-cell office:value-type="string" calcext:value-type="string">
            <text:p>サモン</text:p>
          </table:table-cell>
          <table:table-cell office:value-type="string" calcext:value-type="string">
            <text:p>さもん</text:p>
          </table:table-cell>
          <table:table-cell office:value-type="string" calcext:value-type="string">
            <text:p>第２弾ブースターパック</text:p>
          </table:table-cell>
          <table:table-cell table:formula="of:=VLOOKUP([.G192];[$収録番号.$A$1:$収録番号.$B$9];2;0)" office:value-type="float" office:value="25" calcext:value-type="float">
            <text:p>25</text:p>
          </table:table-cell>
          <table:table-cell office:value-type="string" calcext:value-type="string">
            <text:p>N</text:p>
          </table:table-cell>
          <table:table-cell table:formula="of:=VLOOKUP([.I192];[$レアリティ番号.$A$1:$レアリティ番号.$B$4];2;0)" office:value-type="float" office:value="1" calcext:value-type="float">
            <text:p>1</text:p>
          </table:table-cell>
          <table:table-cell office:value-type="string" calcext:value-type="string">
            <text:p>マホウ</text:p>
          </table:table-cell>
          <table:table-cell table:formula="of:=VLOOKUP([.K192];[$種類番号.$A$1:$種類番号.$B$4];2;0)" office:value-type="float" office:value="3" calcext:value-type="float">
            <text:p>3</text:p>
          </table:table-cell>
          <table:table-cell office:value-type="string" calcext:value-type="string">
            <text:p>赤</text:p>
          </table:table-cell>
          <table:table-cell table:formula="of:=VLOOKUP([.M192];[$色番号.$A$1:$色番号.$B$10];2;0)"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9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2];[$特性番号.$A$1:$特性番号.$B$8];2;0);0)" office:value-type="float" office:value="0" calcext:value-type="float">
            <text:p>0</text:p>
          </table:table-cell>
          <table:table-cell office:value-type="string" calcext:value-type="string">
            <text:p>イジン召喚権+1する。</text:p>
          </table:table-cell>
          <table:table-cell table:style-name="ce8" office:value-type="string" calcext:value-type="string">
            <text:p>手札に戻す</text:p>
          </table:table-cell>
          <table:table-cell table:formula="of:=IFERROR(VLOOKUP([.$V192];[$遺業能力番号.$A$1:$遺業能力番号.$B$9];2;0);0)" office:value-type="float" office:value="5" calcext:value-type="float">
            <text:p>5</text:p>
          </table:table-cell>
          <table:table-cell office:value-type="string" calcext:value-type="string">
            <text:p>https://one-draw.jp/ijinden/cardlist/002/card/02_059.png</text:p>
          </table:table-cell>
          <table:table-cell table:formula="of:=CONCATENATE([$JSON.$A$1];[.$C192];[$JSON.$B$1];[.$E192];[$JSON.$C$1];[.$F192];[$JSON.$D$1];IF(ISNA([.$S192]);&quot;null&quot;;&quot;&quot;&quot;&quot;&amp;[.$S192]&amp;&quot;&quot;&quot;&quot;);[$JSON.$E$1];[.$U192];[$JSON.$F$1];IF(ISNA([.$V192]);&quot;null&quot;;&quot;&quot;&quot;&quot;&amp;[.$V192]&amp;&quot;&quot;&quot;&quot;);[$JSON.$G$1];[.$X192];[$JSON.$H$1];[.$H192];[$JSON.$I$1];[.J192];[$JSON.$J$1];[.$L192];[$JSON.$K$1];[.$O192];[$JSON.$L$1];[.$N192];[$JSON.$M$1];[.$R192];[$JSON.$N$1];[.$T192];[$JSON.$O$1];[.$W192];[$JSON.$P$1];[.$A192];[$JSON.$Q$1];[.$B192];[$JSON.$R$1])" office:value-type="string" office:string-value="{&quot;id&quot;:&quot;2-59&quot;,&quot;name&quot;:&quot;サモン&quot;,&quot;kana&quot;:&quot;さもん&quot;,&quot;traitText&quot;:null,&quot;ruleText&quot;:&quot;イジン召喚権+1する。&quot;,&quot;legacyText&quot;:&quot;手札に戻す&quot;,&quot;imageUrl&quot;:&quot;https://one-draw.jp/ijinden/cardlist/002/card/02_059.png&quot;,&quot;expansion&quot;:25,&quot;rarity&quot;:1,&quot;type&quot;:3,&quot;level&quot;:3,&quot;color&quot;:1,&quot;term&quot;:0,&quot;trait&quot;:0,&quot;legacy&quot;:5,&quot;orderTable&quot;:191,&quot;orderDeck&quot;:306}," calcext:value-type="string">
            <text:p>{"id":"2-59","name":"サモン","kana":"さもん","traitText":null,"ruleText":"イジン召喚権+1する。","legacyText":"手札に戻す","imageUrl":"https://one-draw.jp/ijinden/cardlist/002/card/02_059.png","expansion":25,"rarity":1,"type":3,"level":3,"color":1,"term":0,"trait":0,"legacy":5,"orderTable":191,"orderDeck":306},</text:p>
          </table:table-cell>
          <table:table-cell table:number-columns-repeated="16347"/>
        </table:table-row>
        <table:table-row table:style-name="ro2">
          <table:table-cell office:value-type="float" office:value="192" calcext:value-type="float">
            <text:p>192</text:p>
          </table:table-cell>
          <table:table-cell office:value-type="float" office:value="295" calcext:value-type="float">
            <text:p>295</text:p>
          </table:table-cell>
          <table:table-cell office:value-type="string" calcext:value-type="string">
            <text:p>2-60</text:p>
          </table:table-cell>
          <table:table-cell office:value-type="float" office:value="60" calcext:value-type="float">
            <text:p>60</text:p>
          </table:table-cell>
          <table:table-cell office:value-type="string" calcext:value-type="string">
            <text:p>フェイス</text:p>
          </table:table-cell>
          <table:table-cell office:value-type="string" calcext:value-type="string">
            <text:p>ふぇいす</text:p>
          </table:table-cell>
          <table:table-cell office:value-type="string" calcext:value-type="string">
            <text:p>第２弾ブースターパック</text:p>
          </table:table-cell>
          <table:table-cell table:formula="of:=VLOOKUP([.G193];[$収録番号.$A$1:$収録番号.$B$9];2;0)" office:value-type="float" office:value="25" calcext:value-type="float">
            <text:p>25</text:p>
          </table:table-cell>
          <table:table-cell office:value-type="string" calcext:value-type="string">
            <text:p>N</text:p>
          </table:table-cell>
          <table:table-cell table:formula="of:=VLOOKUP([.I193];[$レアリティ番号.$A$1:$レアリティ番号.$B$4];2;0)" office:value-type="float" office:value="1" calcext:value-type="float">
            <text:p>1</text:p>
          </table:table-cell>
          <table:table-cell office:value-type="string" calcext:value-type="string">
            <text:p>マホウ</text:p>
          </table:table-cell>
          <table:table-cell table:formula="of:=VLOOKUP([.K193];[$種類番号.$A$1:$種類番号.$B$4];2;0)" office:value-type="float" office:value="3" calcext:value-type="float">
            <text:p>3</text:p>
          </table:table-cell>
          <table:table-cell office:value-type="string" calcext:value-type="string">
            <text:p>青</text:p>
          </table:table-cell>
          <table:table-cell table:formula="of:=VLOOKUP([.M193];[$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9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3];[$特性番号.$A$1:$特性番号.$B$8];2;0);0)" office:value-type="float" office:value="0" calcext:value-type="float">
            <text:p>0</text:p>
          </table:table-cell>
          <table:table-cell office:value-type="string" calcext:value-type="string">
            <text:p>自分の山札の上から1枚をガーディアンにして戦場に置く。</text:p>
          </table:table-cell>
          <table:table-cell table:style-name="ce8" office:value-type="string" calcext:value-type="string">
            <text:p>手札に戻す</text:p>
          </table:table-cell>
          <table:table-cell table:formula="of:=IFERROR(VLOOKUP([.$V193];[$遺業能力番号.$A$1:$遺業能力番号.$B$9];2;0);0)" office:value-type="float" office:value="5" calcext:value-type="float">
            <text:p>5</text:p>
          </table:table-cell>
          <table:table-cell office:value-type="string" calcext:value-type="string">
            <text:p>https://one-draw.jp/ijinden/cardlist/002/card/02_060.png</text:p>
          </table:table-cell>
          <table:table-cell table:formula="of:=CONCATENATE([$JSON.$A$1];[.$C193];[$JSON.$B$1];[.$E193];[$JSON.$C$1];[.$F193];[$JSON.$D$1];IF(ISNA([.$S193]);&quot;null&quot;;&quot;&quot;&quot;&quot;&amp;[.$S193]&amp;&quot;&quot;&quot;&quot;);[$JSON.$E$1];[.$U193];[$JSON.$F$1];IF(ISNA([.$V193]);&quot;null&quot;;&quot;&quot;&quot;&quot;&amp;[.$V193]&amp;&quot;&quot;&quot;&quot;);[$JSON.$G$1];[.$X193];[$JSON.$H$1];[.$H193];[$JSON.$I$1];[.J193];[$JSON.$J$1];[.$L193];[$JSON.$K$1];[.$O193];[$JSON.$L$1];[.$N193];[$JSON.$M$1];[.$R193];[$JSON.$N$1];[.$T193];[$JSON.$O$1];[.$W193];[$JSON.$P$1];[.$A193];[$JSON.$Q$1];[.$B193];[$JSON.$R$1])" office:value-type="string" office:string-value="{&quot;id&quot;:&quot;2-60&quot;,&quot;name&quot;:&quot;フェイス&quot;,&quot;kana&quot;:&quot;ふぇいす&quot;,&quot;traitText&quot;:null,&quot;ruleText&quot;:&quot;自分の山札の上から1枚をガーディアンにして戦場に置く。&quot;,&quot;legacyText&quot;:&quot;手札に戻す&quot;,&quot;imageUrl&quot;:&quot;https://one-draw.jp/ijinden/cardlist/002/card/02_060.png&quot;,&quot;expansion&quot;:25,&quot;rarity&quot;:1,&quot;type&quot;:3,&quot;level&quot;:2,&quot;color&quot;:2,&quot;term&quot;:0,&quot;trait&quot;:0,&quot;legacy&quot;:5,&quot;orderTable&quot;:192,&quot;orderDeck&quot;:295}," calcext:value-type="string">
            <text:p>{"id":"2-60","name":"フェイス","kana":"ふぇいす","traitText":null,"ruleText":"自分の山札の上から1枚をガーディアンにして戦場に置く。","legacyText":"手札に戻す","imageUrl":"https://one-draw.jp/ijinden/cardlist/002/card/02_060.png","expansion":25,"rarity":1,"type":3,"level":2,"color":2,"term":0,"trait":0,"legacy":5,"orderTable":192,"orderDeck":295},</text:p>
          </table:table-cell>
          <table:table-cell table:number-columns-repeated="16347"/>
        </table:table-row>
        <table:table-row table:style-name="ro2">
          <table:table-cell office:value-type="float" office:value="193" calcext:value-type="float">
            <text:p>193</text:p>
          </table:table-cell>
          <table:table-cell office:value-type="float" office:value="296" calcext:value-type="float">
            <text:p>296</text:p>
          </table:table-cell>
          <table:table-cell office:value-type="string" calcext:value-type="string">
            <text:p>2-61</text:p>
          </table:table-cell>
          <table:table-cell office:value-type="float" office:value="61" calcext:value-type="float">
            <text:p>61</text:p>
          </table:table-cell>
          <table:table-cell office:value-type="string" calcext:value-type="string">
            <text:p>リドロー</text:p>
          </table:table-cell>
          <table:table-cell office:value-type="string" calcext:value-type="string">
            <text:p>りどろー</text:p>
          </table:table-cell>
          <table:table-cell office:value-type="string" calcext:value-type="string">
            <text:p>第２弾ブースターパック</text:p>
          </table:table-cell>
          <table:table-cell table:formula="of:=VLOOKUP([.G194];[$収録番号.$A$1:$収録番号.$B$9];2;0)" office:value-type="float" office:value="25" calcext:value-type="float">
            <text:p>25</text:p>
          </table:table-cell>
          <table:table-cell office:value-type="string" calcext:value-type="string">
            <text:p>N</text:p>
          </table:table-cell>
          <table:table-cell table:formula="of:=VLOOKUP([.I194];[$レアリティ番号.$A$1:$レアリティ番号.$B$4];2;0)" office:value-type="float" office:value="1" calcext:value-type="float">
            <text:p>1</text:p>
          </table:table-cell>
          <table:table-cell office:value-type="string" calcext:value-type="string">
            <text:p>マホウ</text:p>
          </table:table-cell>
          <table:table-cell table:formula="of:=VLOOKUP([.K194];[$種類番号.$A$1:$種類番号.$B$4];2;0)" office:value-type="float" office:value="3" calcext:value-type="float">
            <text:p>3</text:p>
          </table:table-cell>
          <table:table-cell office:value-type="string" calcext:value-type="string">
            <text:p>青</text:p>
          </table:table-cell>
          <table:table-cell table:formula="of:=VLOOKUP([.M194];[$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9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4];[$特性番号.$A$1:$特性番号.$B$8];2;0);0)" office:value-type="float" office:value="0" calcext:value-type="float">
            <text:p>0</text:p>
          </table:table-cell>
          <table:table-cell office:value-type="string" calcext:value-type="string">
            <text:p>2ドローして、自分の手札1枚を墓地に置く。</text:p>
          </table:table-cell>
          <table:table-cell table:style-name="ce8" office:value-type="string" calcext:value-type="string">
            <text:p>冥府発動</text:p>
          </table:table-cell>
          <table:table-cell table:formula="of:=IFERROR(VLOOKUP([.$V194];[$遺業能力番号.$A$1:$遺業能力番号.$B$9];2;0);0)" office:value-type="float" office:value="2" calcext:value-type="float">
            <text:p>2</text:p>
          </table:table-cell>
          <table:table-cell office:value-type="string" calcext:value-type="string">
            <text:p>https://one-draw.jp/ijinden/cardlist/002/card/02_061.png</text:p>
          </table:table-cell>
          <table:table-cell table:formula="of:=CONCATENATE([$JSON.$A$1];[.$C194];[$JSON.$B$1];[.$E194];[$JSON.$C$1];[.$F194];[$JSON.$D$1];IF(ISNA([.$S194]);&quot;null&quot;;&quot;&quot;&quot;&quot;&amp;[.$S194]&amp;&quot;&quot;&quot;&quot;);[$JSON.$E$1];[.$U194];[$JSON.$F$1];IF(ISNA([.$V194]);&quot;null&quot;;&quot;&quot;&quot;&quot;&amp;[.$V194]&amp;&quot;&quot;&quot;&quot;);[$JSON.$G$1];[.$X194];[$JSON.$H$1];[.$H194];[$JSON.$I$1];[.J194];[$JSON.$J$1];[.$L194];[$JSON.$K$1];[.$O194];[$JSON.$L$1];[.$N194];[$JSON.$M$1];[.$R194];[$JSON.$N$1];[.$T194];[$JSON.$O$1];[.$W194];[$JSON.$P$1];[.$A194];[$JSON.$Q$1];[.$B194];[$JSON.$R$1])" office:value-type="string" office:string-value="{&quot;id&quot;:&quot;2-61&quot;,&quot;name&quot;:&quot;リドロー&quot;,&quot;kana&quot;:&quot;りどろー&quot;,&quot;traitText&quot;:null,&quot;ruleText&quot;:&quot;2ドローして、自分の手札1枚を墓地に置く。&quot;,&quot;legacyText&quot;:&quot;冥府発動&quot;,&quot;imageUrl&quot;:&quot;https://one-draw.jp/ijinden/cardlist/002/card/02_061.png&quot;,&quot;expansion&quot;:25,&quot;rarity&quot;:1,&quot;type&quot;:3,&quot;level&quot;:2,&quot;color&quot;:2,&quot;term&quot;:0,&quot;trait&quot;:0,&quot;legacy&quot;:2,&quot;orderTable&quot;:193,&quot;orderDeck&quot;:296}," calcext:value-type="string">
            <text:p>{"id":"2-61","name":"リドロー","kana":"りどろー","traitText":null,"ruleText":"2ドローして、自分の手札1枚を墓地に置く。","legacyText":"冥府発動","imageUrl":"https://one-draw.jp/ijinden/cardlist/002/card/02_061.png","expansion":25,"rarity":1,"type":3,"level":2,"color":2,"term":0,"trait":0,"legacy":2,"orderTable":193,"orderDeck":296},</text:p>
          </table:table-cell>
          <table:table-cell table:number-columns-repeated="16347"/>
        </table:table-row>
        <table:table-row table:style-name="ro2">
          <table:table-cell office:value-type="float" office:value="194" calcext:value-type="float">
            <text:p>194</text:p>
          </table:table-cell>
          <table:table-cell office:value-type="float" office:value="320" calcext:value-type="float">
            <text:p>320</text:p>
          </table:table-cell>
          <table:table-cell office:value-type="string" calcext:value-type="string">
            <text:p>2-62</text:p>
          </table:table-cell>
          <table:table-cell office:value-type="float" office:value="62" calcext:value-type="float">
            <text:p>62</text:p>
          </table:table-cell>
          <table:table-cell office:value-type="string" calcext:value-type="string">
            <text:p>テンペスト</text:p>
          </table:table-cell>
          <table:table-cell office:value-type="string" calcext:value-type="string">
            <text:p>てんぺすと</text:p>
          </table:table-cell>
          <table:table-cell office:value-type="string" calcext:value-type="string">
            <text:p>第２弾ブースターパック</text:p>
          </table:table-cell>
          <table:table-cell table:formula="of:=VLOOKUP([.G195];[$収録番号.$A$1:$収録番号.$B$9];2;0)" office:value-type="float" office:value="25" calcext:value-type="float">
            <text:p>25</text:p>
          </table:table-cell>
          <table:table-cell office:value-type="string" calcext:value-type="string">
            <text:p>N</text:p>
          </table:table-cell>
          <table:table-cell table:formula="of:=VLOOKUP([.I195];[$レアリティ番号.$A$1:$レアリティ番号.$B$4];2;0)" office:value-type="float" office:value="1" calcext:value-type="float">
            <text:p>1</text:p>
          </table:table-cell>
          <table:table-cell office:value-type="string" calcext:value-type="string">
            <text:p>マホウ</text:p>
          </table:table-cell>
          <table:table-cell table:formula="of:=VLOOKUP([.K195];[$種類番号.$A$1:$種類番号.$B$4];2;0)" office:value-type="float" office:value="3" calcext:value-type="float">
            <text:p>3</text:p>
          </table:table-cell>
          <table:table-cell office:value-type="string" calcext:value-type="string">
            <text:p>青</text:p>
          </table:table-cell>
          <table:table-cell table:formula="of:=VLOOKUP([.M195];[$色番号.$A$1:$色番号.$B$10];2;0)"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9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5];[$特性番号.$A$1:$特性番号.$B$8];2;0);0)" office:value-type="float" office:value="0" calcext:value-type="float">
            <text:p>0</text:p>
          </table:table-cell>
          <table:table-cell office:value-type="string" calcext:value-type="string">
            <text:p>相手の戦場の寝ているイジンすべてを手札に戻す。</text:p>
          </table:table-cell>
          <table:table-cell table:style-name="ce8" office:value-type="string" calcext:value-type="string">
            <text:p>冥府発動</text:p>
          </table:table-cell>
          <table:table-cell table:formula="of:=IFERROR(VLOOKUP([.$V195];[$遺業能力番号.$A$1:$遺業能力番号.$B$9];2;0);0)" office:value-type="float" office:value="2" calcext:value-type="float">
            <text:p>2</text:p>
          </table:table-cell>
          <table:table-cell office:value-type="string" calcext:value-type="string">
            <text:p>https://one-draw.jp/ijinden/cardlist/002/card/02_062.png</text:p>
          </table:table-cell>
          <table:table-cell table:formula="of:=CONCATENATE([$JSON.$A$1];[.$C195];[$JSON.$B$1];[.$E195];[$JSON.$C$1];[.$F195];[$JSON.$D$1];IF(ISNA([.$S195]);&quot;null&quot;;&quot;&quot;&quot;&quot;&amp;[.$S195]&amp;&quot;&quot;&quot;&quot;);[$JSON.$E$1];[.$U195];[$JSON.$F$1];IF(ISNA([.$V195]);&quot;null&quot;;&quot;&quot;&quot;&quot;&amp;[.$V195]&amp;&quot;&quot;&quot;&quot;);[$JSON.$G$1];[.$X195];[$JSON.$H$1];[.$H195];[$JSON.$I$1];[.J195];[$JSON.$J$1];[.$L195];[$JSON.$K$1];[.$O195];[$JSON.$L$1];[.$N195];[$JSON.$M$1];[.$R195];[$JSON.$N$1];[.$T195];[$JSON.$O$1];[.$W195];[$JSON.$P$1];[.$A195];[$JSON.$Q$1];[.$B195];[$JSON.$R$1])" office:value-type="string" office:string-value="{&quot;id&quot;:&quot;2-62&quot;,&quot;name&quot;:&quot;テンペスト&quot;,&quot;kana&quot;:&quot;てんぺすと&quot;,&quot;traitText&quot;:null,&quot;ruleText&quot;:&quot;相手の戦場の寝ているイジンすべてを手札に戻す。&quot;,&quot;legacyText&quot;:&quot;冥府発動&quot;,&quot;imageUrl&quot;:&quot;https://one-draw.jp/ijinden/cardlist/002/card/02_062.png&quot;,&quot;expansion&quot;:25,&quot;rarity&quot;:1,&quot;type&quot;:3,&quot;level&quot;:4,&quot;color&quot;:2,&quot;term&quot;:0,&quot;trait&quot;:0,&quot;legacy&quot;:2,&quot;orderTable&quot;:194,&quot;orderDeck&quot;:320}," calcext:value-type="string">
            <text:p>{"id":"2-62","name":"テンペスト","kana":"てんぺすと","traitText":null,"ruleText":"相手の戦場の寝ているイジンすべてを手札に戻す。","legacyText":"冥府発動","imageUrl":"https://one-draw.jp/ijinden/cardlist/002/card/02_062.png","expansion":25,"rarity":1,"type":3,"level":4,"color":2,"term":0,"trait":0,"legacy":2,"orderTable":194,"orderDeck":320},</text:p>
          </table:table-cell>
          <table:table-cell table:number-columns-repeated="16347"/>
        </table:table-row>
        <table:table-row table:style-name="ro2">
          <table:table-cell office:value-type="float" office:value="195" calcext:value-type="float">
            <text:p>195</text:p>
          </table:table-cell>
          <table:table-cell office:value-type="float" office:value="322" calcext:value-type="float">
            <text:p>322</text:p>
          </table:table-cell>
          <table:table-cell office:value-type="string" calcext:value-type="string">
            <text:p>2-63</text:p>
          </table:table-cell>
          <table:table-cell office:value-type="float" office:value="63" calcext:value-type="float">
            <text:p>63</text:p>
          </table:table-cell>
          <table:table-cell office:value-type="string" calcext:value-type="string">
            <text:p>ミューテイション</text:p>
          </table:table-cell>
          <table:table-cell office:value-type="string" calcext:value-type="string">
            <text:p>みゅーていしょん</text:p>
          </table:table-cell>
          <table:table-cell office:value-type="string" calcext:value-type="string">
            <text:p>第２弾ブースターパック</text:p>
          </table:table-cell>
          <table:table-cell table:formula="of:=VLOOKUP([.G196];[$収録番号.$A$1:$収録番号.$B$9];2;0)" office:value-type="float" office:value="25" calcext:value-type="float">
            <text:p>25</text:p>
          </table:table-cell>
          <table:table-cell office:value-type="string" calcext:value-type="string">
            <text:p>N</text:p>
          </table:table-cell>
          <table:table-cell table:formula="of:=VLOOKUP([.I196];[$レアリティ番号.$A$1:$レアリティ番号.$B$4];2;0)" office:value-type="float" office:value="1" calcext:value-type="float">
            <text:p>1</text:p>
          </table:table-cell>
          <table:table-cell office:value-type="string" calcext:value-type="string">
            <text:p>マホウ</text:p>
          </table:table-cell>
          <table:table-cell table:formula="of:=VLOOKUP([.K196];[$種類番号.$A$1:$種類番号.$B$4];2;0)" office:value-type="float" office:value="3" calcext:value-type="float">
            <text:p>3</text:p>
          </table:table-cell>
          <table:table-cell office:value-type="string" calcext:value-type="string">
            <text:p>緑</text:p>
          </table:table-cell>
          <table:table-cell table:formula="of:=VLOOKUP([.M196];[$色番号.$A$1:$色番号.$B$10];2;0)" office:value-type="float" office:value="4" calcext:value-type="float">
            <text:p>4</text:p>
          </table:table-cell>
          <table:table-cell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Q19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6];[$特性番号.$A$1:$特性番号.$B$8];2;0);0)" office:value-type="float" office:value="0" calcext:value-type="float">
            <text:p>0</text:p>
          </table:table-cell>
          <table:table-cell office:value-type="string" calcext:value-type="string">
            <text:p>戦場のガーディアン1体か、魔力ゾーンの裏のカード1つを指定して発動できる。そのカードを墓地に置き、レベル6以下のイジンなら戦場に置く。</text:p>
          </table:table-cell>
          <table:table-cell table:style-name="ce8" office:value-type="string" calcext:value-type="string">
            <text:p>魔力化</text:p>
          </table:table-cell>
          <table:table-cell table:formula="of:=IFERROR(VLOOKUP([.$V196];[$遺業能力番号.$A$1:$遺業能力番号.$B$9];2;0);0)" office:value-type="float" office:value="1" calcext:value-type="float">
            <text:p>1</text:p>
          </table:table-cell>
          <table:table-cell office:value-type="string" calcext:value-type="string">
            <text:p>https://one-draw.jp/ijinden/cardlist/002/card/02_063.png</text:p>
          </table:table-cell>
          <table:table-cell table:formula="of:=CONCATENATE([$JSON.$A$1];[.$C196];[$JSON.$B$1];[.$E196];[$JSON.$C$1];[.$F196];[$JSON.$D$1];IF(ISNA([.$S196]);&quot;null&quot;;&quot;&quot;&quot;&quot;&amp;[.$S196]&amp;&quot;&quot;&quot;&quot;);[$JSON.$E$1];[.$U196];[$JSON.$F$1];IF(ISNA([.$V196]);&quot;null&quot;;&quot;&quot;&quot;&quot;&amp;[.$V196]&amp;&quot;&quot;&quot;&quot;);[$JSON.$G$1];[.$X196];[$JSON.$H$1];[.$H196];[$JSON.$I$1];[.J196];[$JSON.$J$1];[.$L196];[$JSON.$K$1];[.$O196];[$JSON.$L$1];[.$N196];[$JSON.$M$1];[.$R196];[$JSON.$N$1];[.$T196];[$JSON.$O$1];[.$W196];[$JSON.$P$1];[.$A196];[$JSON.$Q$1];[.$B196];[$JSON.$R$1])" office:value-type="string" office:string-value="{&quot;id&quot;:&quot;2-63&quot;,&quot;name&quot;:&quot;ミューテイション&quot;,&quot;kana&quot;:&quot;みゅーていしょん&quot;,&quot;traitText&quot;:null,&quot;ruleText&quot;:&quot;戦場のガーディアン1体か、魔力ゾーンの裏のカード1つを指定して発動できる。そのカードを墓地に置き、レベル6以下のイジンなら戦場に置く。&quot;,&quot;legacyText&quot;:&quot;魔力化&quot;,&quot;imageUrl&quot;:&quot;https://one-draw.jp/ijinden/cardlist/002/card/02_063.png&quot;,&quot;expansion&quot;:25,&quot;rarity&quot;:1,&quot;type&quot;:3,&quot;level&quot;:4,&quot;color&quot;:4,&quot;term&quot;:0,&quot;trait&quot;:0,&quot;legacy&quot;:1,&quot;orderTable&quot;:195,&quot;orderDeck&quot;:322}," calcext:value-type="string">
            <text:p>{"id":"2-63","name":"ミューテイション","kana":"みゅーていしょん","traitText":null,"ruleText":"戦場のガーディアン1体か、魔力ゾーンの裏のカード1つを指定して発動できる。そのカードを墓地に置き、レベル6以下のイジンなら戦場に置く。","legacyText":"魔力化","imageUrl":"https://one-draw.jp/ijinden/cardlist/002/card/02_063.png","expansion":25,"rarity":1,"type":3,"level":4,"color":4,"term":0,"trait":0,"legacy":1,"orderTable":195,"orderDeck":322},</text:p>
          </table:table-cell>
          <table:table-cell table:number-columns-repeated="16347"/>
        </table:table-row>
        <table:table-row table:style-name="ro2">
          <table:table-cell office:value-type="float" office:value="196" calcext:value-type="float">
            <text:p>196</text:p>
          </table:table-cell>
          <table:table-cell office:value-type="float" office:value="329" calcext:value-type="float">
            <text:p>329</text:p>
          </table:table-cell>
          <table:table-cell office:value-type="string" calcext:value-type="string">
            <text:p>2-64</text:p>
          </table:table-cell>
          <table:table-cell office:value-type="float" office:value="64" calcext:value-type="float">
            <text:p>64</text:p>
          </table:table-cell>
          <table:table-cell office:value-type="string" calcext:value-type="string">
            <text:p>ライブラリー</text:p>
          </table:table-cell>
          <table:table-cell office:value-type="string" calcext:value-type="string">
            <text:p>らいぶらりー</text:p>
          </table:table-cell>
          <table:table-cell office:value-type="string" calcext:value-type="string">
            <text:p>第２弾ブースターパック</text:p>
          </table:table-cell>
          <table:table-cell table:formula="of:=VLOOKUP([.G197];[$収録番号.$A$1:$収録番号.$B$9];2;0)" office:value-type="float" office:value="25" calcext:value-type="float">
            <text:p>25</text:p>
          </table:table-cell>
          <table:table-cell office:value-type="string" calcext:value-type="string">
            <text:p>N</text:p>
          </table:table-cell>
          <table:table-cell table:formula="of:=VLOOKUP([.I197];[$レアリティ番号.$A$1:$レアリティ番号.$B$4];2;0)" office:value-type="float" office:value="1" calcext:value-type="float">
            <text:p>1</text:p>
          </table:table-cell>
          <table:table-cell office:value-type="string" calcext:value-type="string">
            <text:p>マホウ</text:p>
          </table:table-cell>
          <table:table-cell table:formula="of:=VLOOKUP([.K197];[$種類番号.$A$1:$種類番号.$B$4];2;0)" office:value-type="float" office:value="3" calcext:value-type="float">
            <text:p>3</text:p>
          </table:table-cell>
          <table:table-cell office:value-type="string" calcext:value-type="string">
            <text:p>緑</text:p>
          </table:table-cell>
          <table:table-cell table:formula="of:=VLOOKUP([.M197];[$色番号.$A$1:$色番号.$B$10];2;0)"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Q19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7];[$特性番号.$A$1:$特性番号.$B$8];2;0);0)" office:value-type="float" office:value="0" calcext:value-type="float">
            <text:p>0</text:p>
          </table:table-cell>
          <table:table-cell office:value-type="string" calcext:value-type="string">
            <text:p>自分の戦場のガーディアンすべてを裏のまま魔力ゾーンに置き、自分の山札の上から2枚をガーディアンにして戦場に置く。</text:p>
          </table:table-cell>
          <table:table-cell table:style-name="ce8" office:value-type="string" calcext:value-type="string">
            <text:p>魔力化</text:p>
          </table:table-cell>
          <table:table-cell table:formula="of:=IFERROR(VLOOKUP([.$V197];[$遺業能力番号.$A$1:$遺業能力番号.$B$9];2;0);0)" office:value-type="float" office:value="1" calcext:value-type="float">
            <text:p>1</text:p>
          </table:table-cell>
          <table:table-cell office:value-type="string" calcext:value-type="string">
            <text:p>https://one-draw.jp/ijinden/cardlist/002/card/02_064.png</text:p>
          </table:table-cell>
          <table:table-cell table:formula="of:=CONCATENATE([$JSON.$A$1];[.$C197];[$JSON.$B$1];[.$E197];[$JSON.$C$1];[.$F197];[$JSON.$D$1];IF(ISNA([.$S197]);&quot;null&quot;;&quot;&quot;&quot;&quot;&amp;[.$S197]&amp;&quot;&quot;&quot;&quot;);[$JSON.$E$1];[.$U197];[$JSON.$F$1];IF(ISNA([.$V197]);&quot;null&quot;;&quot;&quot;&quot;&quot;&amp;[.$V197]&amp;&quot;&quot;&quot;&quot;);[$JSON.$G$1];[.$X197];[$JSON.$H$1];[.$H197];[$JSON.$I$1];[.J197];[$JSON.$J$1];[.$L197];[$JSON.$K$1];[.$O197];[$JSON.$L$1];[.$N197];[$JSON.$M$1];[.$R197];[$JSON.$N$1];[.$T197];[$JSON.$O$1];[.$W197];[$JSON.$P$1];[.$A197];[$JSON.$Q$1];[.$B197];[$JSON.$R$1])" office:value-type="string" office:string-value="{&quot;id&quot;:&quot;2-64&quot;,&quot;name&quot;:&quot;ライブラリー&quot;,&quot;kana&quot;:&quot;らいぶらりー&quot;,&quot;traitText&quot;:null,&quot;ruleText&quot;:&quot;自分の戦場のガーディアンすべてを裏のまま魔力ゾーンに置き、自分の山札の上から2枚をガーディアンにして戦場に置く。&quot;,&quot;legacyText&quot;:&quot;魔力化&quot;,&quot;imageUrl&quot;:&quot;https://one-draw.jp/ijinden/cardlist/002/card/02_064.png&quot;,&quot;expansion&quot;:25,&quot;rarity&quot;:1,&quot;type&quot;:3,&quot;level&quot;:5,&quot;color&quot;:4,&quot;term&quot;:0,&quot;trait&quot;:0,&quot;legacy&quot;:1,&quot;orderTable&quot;:196,&quot;orderDeck&quot;:329}," calcext:value-type="string">
            <text:p>{"id":"2-64","name":"ライブラリー","kana":"らいぶらりー","traitText":null,"ruleText":"自分の戦場のガーディアンすべてを裏のまま魔力ゾーンに置き、自分の山札の上から2枚をガーディアンにして戦場に置く。","legacyText":"魔力化","imageUrl":"https://one-draw.jp/ijinden/cardlist/002/card/02_064.png","expansion":25,"rarity":1,"type":3,"level":5,"color":4,"term":0,"trait":0,"legacy":1,"orderTable":196,"orderDeck":329},</text:p>
          </table:table-cell>
          <table:table-cell table:number-columns-repeated="16347"/>
        </table:table-row>
        <table:table-row table:style-name="ro2">
          <table:table-cell office:value-type="float" office:value="197" calcext:value-type="float">
            <text:p>197</text:p>
          </table:table-cell>
          <table:table-cell office:value-type="float" office:value="284" calcext:value-type="float">
            <text:p>284</text:p>
          </table:table-cell>
          <table:table-cell office:value-type="string" calcext:value-type="string">
            <text:p>2-65</text:p>
          </table:table-cell>
          <table:table-cell office:value-type="float" office:value="65" calcext:value-type="float">
            <text:p>65</text:p>
          </table:table-cell>
          <table:table-cell office:value-type="string" calcext:value-type="string">
            <text:p>チャージ</text:p>
          </table:table-cell>
          <table:table-cell office:value-type="string" calcext:value-type="string">
            <text:p>ちゃーじ</text:p>
          </table:table-cell>
          <table:table-cell office:value-type="string" calcext:value-type="string">
            <text:p>第２弾ブースターパック</text:p>
          </table:table-cell>
          <table:table-cell table:formula="of:=VLOOKUP([.G198];[$収録番号.$A$1:$収録番号.$B$9];2;0)" office:value-type="float" office:value="25" calcext:value-type="float">
            <text:p>25</text:p>
          </table:table-cell>
          <table:table-cell office:value-type="string" calcext:value-type="string">
            <text:p>N</text:p>
          </table:table-cell>
          <table:table-cell table:formula="of:=VLOOKUP([.I198];[$レアリティ番号.$A$1:$レアリティ番号.$B$4];2;0)" office:value-type="float" office:value="1" calcext:value-type="float">
            <text:p>1</text:p>
          </table:table-cell>
          <table:table-cell office:value-type="string" calcext:value-type="string">
            <text:p>マホウ</text:p>
          </table:table-cell>
          <table:table-cell table:formula="of:=VLOOKUP([.K198];[$種類番号.$A$1:$種類番号.$B$4];2;0)" office:value-type="float" office:value="3" calcext:value-type="float">
            <text:p>3</text:p>
          </table:table-cell>
          <table:table-cell office:value-type="string" calcext:value-type="string">
            <text:p>緑</text:p>
          </table:table-cell>
          <table:table-cell table:formula="of:=VLOOKUP([.M198];[$色番号.$A$1:$色番号.$B$10];2;0)" office:value-type="float" office:value="4" calcext:value-type="float">
            <text:p>4</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Q19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8];[$特性番号.$A$1:$特性番号.$B$8];2;0);0)" office:value-type="float" office:value="0" calcext:value-type="float">
            <text:p>0</text:p>
          </table:table-cell>
          <table:table-cell office:value-type="string" calcext:value-type="string">
            <text:p>マリョク配置権+1する。</text:p>
          </table:table-cell>
          <table:table-cell table:style-name="ce8" office:value-type="string" calcext:value-type="string">
            <text:p>手札に戻す</text:p>
          </table:table-cell>
          <table:table-cell table:formula="of:=IFERROR(VLOOKUP([.$V198];[$遺業能力番号.$A$1:$遺業能力番号.$B$9];2;0);0)" office:value-type="float" office:value="5" calcext:value-type="float">
            <text:p>5</text:p>
          </table:table-cell>
          <table:table-cell office:value-type="string" calcext:value-type="string">
            <text:p>https://one-draw.jp/ijinden/cardlist/002/card/02_065.png</text:p>
          </table:table-cell>
          <table:table-cell table:formula="of:=CONCATENATE([$JSON.$A$1];[.$C198];[$JSON.$B$1];[.$E198];[$JSON.$C$1];[.$F198];[$JSON.$D$1];IF(ISNA([.$S198]);&quot;null&quot;;&quot;&quot;&quot;&quot;&amp;[.$S198]&amp;&quot;&quot;&quot;&quot;);[$JSON.$E$1];[.$U198];[$JSON.$F$1];IF(ISNA([.$V198]);&quot;null&quot;;&quot;&quot;&quot;&quot;&amp;[.$V198]&amp;&quot;&quot;&quot;&quot;);[$JSON.$G$1];[.$X198];[$JSON.$H$1];[.$H198];[$JSON.$I$1];[.J198];[$JSON.$J$1];[.$L198];[$JSON.$K$1];[.$O198];[$JSON.$L$1];[.$N198];[$JSON.$M$1];[.$R198];[$JSON.$N$1];[.$T198];[$JSON.$O$1];[.$W198];[$JSON.$P$1];[.$A198];[$JSON.$Q$1];[.$B198];[$JSON.$R$1])" office:value-type="string" office:string-value="{&quot;id&quot;:&quot;2-65&quot;,&quot;name&quot;:&quot;チャージ&quot;,&quot;kana&quot;:&quot;ちゃーじ&quot;,&quot;traitText&quot;:null,&quot;ruleText&quot;:&quot;マリョク配置権+1する。&quot;,&quot;legacyText&quot;:&quot;手札に戻す&quot;,&quot;imageUrl&quot;:&quot;https://one-draw.jp/ijinden/cardlist/002/card/02_065.png&quot;,&quot;expansion&quot;:25,&quot;rarity&quot;:1,&quot;type&quot;:3,&quot;level&quot;:1,&quot;color&quot;:4,&quot;term&quot;:0,&quot;trait&quot;:0,&quot;legacy&quot;:5,&quot;orderTable&quot;:197,&quot;orderDeck&quot;:284}," calcext:value-type="string">
            <text:p>{"id":"2-65","name":"チャージ","kana":"ちゃーじ","traitText":null,"ruleText":"マリョク配置権+1する。","legacyText":"手札に戻す","imageUrl":"https://one-draw.jp/ijinden/cardlist/002/card/02_065.png","expansion":25,"rarity":1,"type":3,"level":1,"color":4,"term":0,"trait":0,"legacy":5,"orderTable":197,"orderDeck":284},</text:p>
          </table:table-cell>
          <table:table-cell table:number-columns-repeated="16347"/>
        </table:table-row>
        <table:table-row table:style-name="ro2">
          <table:table-cell office:value-type="float" office:value="198" calcext:value-type="float">
            <text:p>198</text:p>
          </table:table-cell>
          <table:table-cell office:value-type="float" office:value="330" calcext:value-type="float">
            <text:p>330</text:p>
          </table:table-cell>
          <table:table-cell office:value-type="string" calcext:value-type="string">
            <text:p>2-66</text:p>
          </table:table-cell>
          <table:table-cell office:value-type="float" office:value="66" calcext:value-type="float">
            <text:p>66</text:p>
          </table:table-cell>
          <table:table-cell office:value-type="string" calcext:value-type="string">
            <text:p>カタストロフィ</text:p>
          </table:table-cell>
          <table:table-cell office:value-type="string" calcext:value-type="string">
            <text:p>かたすとろふぃ</text:p>
          </table:table-cell>
          <table:table-cell office:value-type="string" calcext:value-type="string">
            <text:p>第２弾ブースターパック</text:p>
          </table:table-cell>
          <table:table-cell table:formula="of:=VLOOKUP([.G199];[$収録番号.$A$1:$収録番号.$B$9];2;0)" office:value-type="float" office:value="25" calcext:value-type="float">
            <text:p>25</text:p>
          </table:table-cell>
          <table:table-cell office:value-type="string" calcext:value-type="string">
            <text:p>N</text:p>
          </table:table-cell>
          <table:table-cell table:formula="of:=VLOOKUP([.I199];[$レアリティ番号.$A$1:$レアリティ番号.$B$4];2;0)" office:value-type="float" office:value="1" calcext:value-type="float">
            <text:p>1</text:p>
          </table:table-cell>
          <table:table-cell office:value-type="string" calcext:value-type="string">
            <text:p>マホウ</text:p>
          </table:table-cell>
          <table:table-cell table:formula="of:=VLOOKUP([.K199];[$種類番号.$A$1:$種類番号.$B$4];2;0)" office:value-type="float" office:value="3" calcext:value-type="float">
            <text:p>3</text:p>
          </table:table-cell>
          <table:table-cell office:value-type="string" calcext:value-type="string">
            <text:p>黄</text:p>
          </table:table-cell>
          <table:table-cell table:formula="of:=VLOOKUP([.M199];[$色番号.$A$1:$色番号.$B$10];2;0)"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Q19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9];[$特性番号.$A$1:$特性番号.$B$8];2;0);0)" office:value-type="float" office:value="0" calcext:value-type="float">
            <text:p>0</text:p>
          </table:table-cell>
          <table:table-cell office:value-type="string" calcext:value-type="string">
            <text:p>自分の戦場のガーディアン1体を指定して発動できる。そのガーディアンを山札の下に戻して、イジンすべてを破壊する。</text:p>
          </table:table-cell>
          <table:table-cell table:style-name="ce8" office:value-type="string" calcext:value-type="string">
            <text:p>冥府発動</text:p>
          </table:table-cell>
          <table:table-cell table:formula="of:=IFERROR(VLOOKUP([.$V199];[$遺業能力番号.$A$1:$遺業能力番号.$B$9];2;0);0)" office:value-type="float" office:value="2" calcext:value-type="float">
            <text:p>2</text:p>
          </table:table-cell>
          <table:table-cell office:value-type="string" calcext:value-type="string">
            <text:p>https://one-draw.jp/ijinden/cardlist/002/card/02_066.png</text:p>
          </table:table-cell>
          <table:table-cell table:formula="of:=CONCATENATE([$JSON.$A$1];[.$C199];[$JSON.$B$1];[.$E199];[$JSON.$C$1];[.$F199];[$JSON.$D$1];IF(ISNA([.$S199]);&quot;null&quot;;&quot;&quot;&quot;&quot;&amp;[.$S199]&amp;&quot;&quot;&quot;&quot;);[$JSON.$E$1];[.$U199];[$JSON.$F$1];IF(ISNA([.$V199]);&quot;null&quot;;&quot;&quot;&quot;&quot;&amp;[.$V199]&amp;&quot;&quot;&quot;&quot;);[$JSON.$G$1];[.$X199];[$JSON.$H$1];[.$H199];[$JSON.$I$1];[.J199];[$JSON.$J$1];[.$L199];[$JSON.$K$1];[.$O199];[$JSON.$L$1];[.$N199];[$JSON.$M$1];[.$R199];[$JSON.$N$1];[.$T199];[$JSON.$O$1];[.$W199];[$JSON.$P$1];[.$A199];[$JSON.$Q$1];[.$B199];[$JSON.$R$1])" office:value-type="string" office:string-value="{&quot;id&quot;:&quot;2-66&quot;,&quot;name&quot;:&quot;カタストロフィ&quot;,&quot;kana&quot;:&quot;かたすとろふぃ&quot;,&quot;traitText&quot;:null,&quot;ruleText&quot;:&quot;自分の戦場のガーディアン1体を指定して発動できる。そのガーディアンを山札の下に戻して、イジンすべてを破壊する。&quot;,&quot;legacyText&quot;:&quot;冥府発動&quot;,&quot;imageUrl&quot;:&quot;https://one-draw.jp/ijinden/cardlist/002/card/02_066.png&quot;,&quot;expansion&quot;:25,&quot;rarity&quot;:1,&quot;type&quot;:3,&quot;level&quot;:5,&quot;color&quot;:8,&quot;term&quot;:0,&quot;trait&quot;:0,&quot;legacy&quot;:2,&quot;orderTable&quot;:198,&quot;orderDeck&quot;:330}," calcext:value-type="string">
            <text:p>{"id":"2-66","name":"カタストロフィ","kana":"かたすとろふぃ","traitText":null,"ruleText":"自分の戦場のガーディアン1体を指定して発動できる。そのガーディアンを山札の下に戻して、イジンすべてを破壊する。","legacyText":"冥府発動","imageUrl":"https://one-draw.jp/ijinden/cardlist/002/card/02_066.png","expansion":25,"rarity":1,"type":3,"level":5,"color":8,"term":0,"trait":0,"legacy":2,"orderTable":198,"orderDeck":330},</text:p>
          </table:table-cell>
          <table:table-cell table:number-columns-repeated="16347"/>
        </table:table-row>
        <table:table-row table:style-name="ro2">
          <table:table-cell office:value-type="float" office:value="199" calcext:value-type="float">
            <text:p>199</text:p>
          </table:table-cell>
          <table:table-cell office:value-type="float" office:value="313" calcext:value-type="float">
            <text:p>313</text:p>
          </table:table-cell>
          <table:table-cell office:value-type="string" calcext:value-type="string">
            <text:p>2-67</text:p>
          </table:table-cell>
          <table:table-cell office:value-type="float" office:value="67" calcext:value-type="float">
            <text:p>67</text:p>
          </table:table-cell>
          <table:table-cell office:value-type="string" calcext:value-type="string">
            <text:p>エクスキューション</text:p>
          </table:table-cell>
          <table:table-cell office:value-type="string" calcext:value-type="string">
            <text:p>えくすきゅーしょん</text:p>
          </table:table-cell>
          <table:table-cell office:value-type="string" calcext:value-type="string">
            <text:p>第２弾ブースターパック</text:p>
          </table:table-cell>
          <table:table-cell table:formula="of:=VLOOKUP([.G200];[$収録番号.$A$1:$収録番号.$B$9];2;0)" office:value-type="float" office:value="25" calcext:value-type="float">
            <text:p>25</text:p>
          </table:table-cell>
          <table:table-cell office:value-type="string" calcext:value-type="string">
            <text:p>R</text:p>
          </table:table-cell>
          <table:table-cell table:formula="of:=VLOOKUP([.I200];[$レアリティ番号.$A$1:$レアリティ番号.$B$4];2;0)" office:value-type="float" office:value="2" calcext:value-type="float">
            <text:p>2</text:p>
          </table:table-cell>
          <table:table-cell office:value-type="string" calcext:value-type="string">
            <text:p>マホウ</text:p>
          </table:table-cell>
          <table:table-cell table:formula="of:=VLOOKUP([.K200];[$種類番号.$A$1:$種類番号.$B$4];2;0)" office:value-type="float" office:value="3" calcext:value-type="float">
            <text:p>3</text:p>
          </table:table-cell>
          <table:table-cell office:value-type="string" calcext:value-type="string">
            <text:p>黄</text:p>
          </table:table-cell>
          <table:table-cell table:formula="of:=VLOOKUP([.M200];[$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0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0];[$特性番号.$A$1:$特性番号.$B$8];2;0);0)" office:value-type="float" office:value="0" calcext:value-type="float">
            <text:p>0</text:p>
          </table:table-cell>
          <table:table-cell office:value-type="string" calcext:value-type="string">
            <text:p>戦場のレベル4以下のイジン1体を指定して発動できる。そのイジンを破壊する。</text:p>
          </table:table-cell>
          <table:table-cell table:style-name="ce8" office:value-type="string" calcext:value-type="string">
            <text:p>冥府発動</text:p>
          </table:table-cell>
          <table:table-cell table:formula="of:=IFERROR(VLOOKUP([.$V200];[$遺業能力番号.$A$1:$遺業能力番号.$B$9];2;0);0)" office:value-type="float" office:value="2" calcext:value-type="float">
            <text:p>2</text:p>
          </table:table-cell>
          <table:table-cell office:value-type="string" calcext:value-type="string">
            <text:p>https://one-draw.jp/ijinden/cardlist/002/card/02_067.png</text:p>
          </table:table-cell>
          <table:table-cell table:formula="of:=CONCATENATE([$JSON.$A$1];[.$C200];[$JSON.$B$1];[.$E200];[$JSON.$C$1];[.$F200];[$JSON.$D$1];IF(ISNA([.$S200]);&quot;null&quot;;&quot;&quot;&quot;&quot;&amp;[.$S200]&amp;&quot;&quot;&quot;&quot;);[$JSON.$E$1];[.$U200];[$JSON.$F$1];IF(ISNA([.$V200]);&quot;null&quot;;&quot;&quot;&quot;&quot;&amp;[.$V200]&amp;&quot;&quot;&quot;&quot;);[$JSON.$G$1];[.$X200];[$JSON.$H$1];[.$H200];[$JSON.$I$1];[.J200];[$JSON.$J$1];[.$L200];[$JSON.$K$1];[.$O200];[$JSON.$L$1];[.$N200];[$JSON.$M$1];[.$R200];[$JSON.$N$1];[.$T200];[$JSON.$O$1];[.$W200];[$JSON.$P$1];[.$A200];[$JSON.$Q$1];[.$B200];[$JSON.$R$1])" office:value-type="string" office:string-value="{&quot;id&quot;:&quot;2-67&quot;,&quot;name&quot;:&quot;エクスキューション&quot;,&quot;kana&quot;:&quot;えくすきゅーしょん&quot;,&quot;traitText&quot;:null,&quot;ruleText&quot;:&quot;戦場のレベル4以下のイジン1体を指定して発動できる。そのイジンを破壊する。&quot;,&quot;legacyText&quot;:&quot;冥府発動&quot;,&quot;imageUrl&quot;:&quot;https://one-draw.jp/ijinden/cardlist/002/card/02_067.png&quot;,&quot;expansion&quot;:25,&quot;rarity&quot;:2,&quot;type&quot;:3,&quot;level&quot;:3,&quot;color&quot;:8,&quot;term&quot;:0,&quot;trait&quot;:0,&quot;legacy&quot;:2,&quot;orderTable&quot;:199,&quot;orderDeck&quot;:313}," calcext:value-type="string">
            <text:p>{"id":"2-67","name":"エクスキューション","kana":"えくすきゅーしょん","traitText":null,"ruleText":"戦場のレベル4以下のイジン1体を指定して発動できる。そのイジンを破壊する。","legacyText":"冥府発動","imageUrl":"https://one-draw.jp/ijinden/cardlist/002/card/02_067.png","expansion":25,"rarity":2,"type":3,"level":3,"color":8,"term":0,"trait":0,"legacy":2,"orderTable":199,"orderDeck":313},</text:p>
          </table:table-cell>
          <table:table-cell table:number-columns-repeated="16347"/>
        </table:table-row>
        <table:table-row table:style-name="ro2">
          <table:table-cell office:value-type="float" office:value="200" calcext:value-type="float">
            <text:p>200</text:p>
          </table:table-cell>
          <table:table-cell office:value-type="float" office:value="323" calcext:value-type="float">
            <text:p>323</text:p>
          </table:table-cell>
          <table:table-cell office:value-type="string" calcext:value-type="string">
            <text:p>2-68</text:p>
          </table:table-cell>
          <table:table-cell office:value-type="float" office:value="68" calcext:value-type="float">
            <text:p>68</text:p>
          </table:table-cell>
          <table:table-cell office:value-type="string" calcext:value-type="string">
            <text:p>メロウ</text:p>
          </table:table-cell>
          <table:table-cell office:value-type="string" calcext:value-type="string">
            <text:p>めろう</text:p>
          </table:table-cell>
          <table:table-cell office:value-type="string" calcext:value-type="string">
            <text:p>第２弾ブースターパック</text:p>
          </table:table-cell>
          <table:table-cell table:formula="of:=VLOOKUP([.G201];[$収録番号.$A$1:$収録番号.$B$9];2;0)" office:value-type="float" office:value="25" calcext:value-type="float">
            <text:p>25</text:p>
          </table:table-cell>
          <table:table-cell office:value-type="string" calcext:value-type="string">
            <text:p>N</text:p>
          </table:table-cell>
          <table:table-cell table:formula="of:=VLOOKUP([.I201];[$レアリティ番号.$A$1:$レアリティ番号.$B$4];2;0)" office:value-type="float" office:value="1" calcext:value-type="float">
            <text:p>1</text:p>
          </table:table-cell>
          <table:table-cell office:value-type="string" calcext:value-type="string">
            <text:p>マホウ</text:p>
          </table:table-cell>
          <table:table-cell table:formula="of:=VLOOKUP([.K201];[$種類番号.$A$1:$種類番号.$B$4];2;0)" office:value-type="float" office:value="3" calcext:value-type="float">
            <text:p>3</text:p>
          </table:table-cell>
          <table:table-cell office:value-type="string" calcext:value-type="string">
            <text:p>黄</text:p>
          </table:table-cell>
          <table:table-cell table:formula="of:=VLOOKUP([.M201];[$色番号.$A$1:$色番号.$B$10];2;0)"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0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1];[$特性番号.$A$1:$特性番号.$B$8];2;0);0)" office:value-type="float" office:value="0" calcext:value-type="float">
            <text:p>0</text:p>
          </table:table-cell>
          <table:table-cell office:value-type="string" calcext:value-type="string">
            <text:p>戦場のレベル7以下のカード1つを指定して発動できる。そのカードをガーディアンにする。</text:p>
          </table:table-cell>
          <table:table-cell table:style-name="ce8" office:value-type="string" calcext:value-type="string">
            <text:p>冥府発動</text:p>
          </table:table-cell>
          <table:table-cell table:formula="of:=IFERROR(VLOOKUP([.$V201];[$遺業能力番号.$A$1:$遺業能力番号.$B$9];2;0);0)" office:value-type="float" office:value="2" calcext:value-type="float">
            <text:p>2</text:p>
          </table:table-cell>
          <table:table-cell office:value-type="string" calcext:value-type="string">
            <text:p>https://one-draw.jp/ijinden/cardlist/002/card/02_068.png</text:p>
          </table:table-cell>
          <table:table-cell table:formula="of:=CONCATENATE([$JSON.$A$1];[.$C201];[$JSON.$B$1];[.$E201];[$JSON.$C$1];[.$F201];[$JSON.$D$1];IF(ISNA([.$S201]);&quot;null&quot;;&quot;&quot;&quot;&quot;&amp;[.$S201]&amp;&quot;&quot;&quot;&quot;);[$JSON.$E$1];[.$U201];[$JSON.$F$1];IF(ISNA([.$V201]);&quot;null&quot;;&quot;&quot;&quot;&quot;&amp;[.$V201]&amp;&quot;&quot;&quot;&quot;);[$JSON.$G$1];[.$X201];[$JSON.$H$1];[.$H201];[$JSON.$I$1];[.J201];[$JSON.$J$1];[.$L201];[$JSON.$K$1];[.$O201];[$JSON.$L$1];[.$N201];[$JSON.$M$1];[.$R201];[$JSON.$N$1];[.$T201];[$JSON.$O$1];[.$W201];[$JSON.$P$1];[.$A201];[$JSON.$Q$1];[.$B201];[$JSON.$R$1])" office:value-type="string" office:string-value="{&quot;id&quot;:&quot;2-68&quot;,&quot;name&quot;:&quot;メロウ&quot;,&quot;kana&quot;:&quot;めろう&quot;,&quot;traitText&quot;:null,&quot;ruleText&quot;:&quot;戦場のレベル7以下のカード1つを指定して発動できる。そのカードをガーディアンにする。&quot;,&quot;legacyText&quot;:&quot;冥府発動&quot;,&quot;imageUrl&quot;:&quot;https://one-draw.jp/ijinden/cardlist/002/card/02_068.png&quot;,&quot;expansion&quot;:25,&quot;rarity&quot;:1,&quot;type&quot;:3,&quot;level&quot;:4,&quot;color&quot;:8,&quot;term&quot;:0,&quot;trait&quot;:0,&quot;legacy&quot;:2,&quot;orderTable&quot;:200,&quot;orderDeck&quot;:323}," calcext:value-type="string">
            <text:p>{"id":"2-68","name":"メロウ","kana":"めろう","traitText":null,"ruleText":"戦場のレベル7以下のカード1つを指定して発動できる。そのカードをガーディアンにする。","legacyText":"冥府発動","imageUrl":"https://one-draw.jp/ijinden/cardlist/002/card/02_068.png","expansion":25,"rarity":1,"type":3,"level":4,"color":8,"term":0,"trait":0,"legacy":2,"orderTable":200,"orderDeck":323},</text:p>
          </table:table-cell>
          <table:table-cell table:number-columns-repeated="16347"/>
        </table:table-row>
        <table:table-row table:style-name="ro2">
          <table:table-cell office:value-type="float" office:value="201" calcext:value-type="float">
            <text:p>201</text:p>
          </table:table-cell>
          <table:table-cell office:value-type="float" office:value="314" calcext:value-type="float">
            <text:p>314</text:p>
          </table:table-cell>
          <table:table-cell office:value-type="string" calcext:value-type="string">
            <text:p>2-69</text:p>
          </table:table-cell>
          <table:table-cell office:value-type="float" office:value="69" calcext:value-type="float">
            <text:p>69</text:p>
          </table:table-cell>
          <table:table-cell office:value-type="string" calcext:value-type="string">
            <text:p>スカーレット</text:p>
          </table:table-cell>
          <table:table-cell office:value-type="string" calcext:value-type="string">
            <text:p>すかーれっと</text:p>
          </table:table-cell>
          <table:table-cell office:value-type="string" calcext:value-type="string">
            <text:p>第２弾ブースターパック</text:p>
          </table:table-cell>
          <table:table-cell table:formula="of:=VLOOKUP([.G202];[$収録番号.$A$1:$収録番号.$B$9];2;0)" office:value-type="float" office:value="25" calcext:value-type="float">
            <text:p>25</text:p>
          </table:table-cell>
          <table:table-cell office:value-type="string" calcext:value-type="string">
            <text:p>N</text:p>
          </table:table-cell>
          <table:table-cell table:formula="of:=VLOOKUP([.I202];[$レアリティ番号.$A$1:$レアリティ番号.$B$4];2;0)" office:value-type="float" office:value="1" calcext:value-type="float">
            <text:p>1</text:p>
          </table:table-cell>
          <table:table-cell office:value-type="string" calcext:value-type="string">
            <text:p>マホウ</text:p>
          </table:table-cell>
          <table:table-cell table:formula="of:=VLOOKUP([.K202];[$種類番号.$A$1:$種類番号.$B$4];2;0)" office:value-type="float" office:value="3" calcext:value-type="float">
            <text:p>3</text:p>
          </table:table-cell>
          <table:table-cell office:value-type="string" calcext:value-type="string">
            <text:p>黄</text:p>
          </table:table-cell>
          <table:table-cell table:formula="of:=VLOOKUP([.M202];[$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赤魔導</text:p>
          </table:table-cell>
          <table:table-cell table:formula="of:=IFERROR(VLOOKUP([.$Q202];[$能力語番号.$A$1:$能力語番号.$B$10];2;0);0)" office:value-type="float" office:value="48" calcext:value-type="float">
            <text:p>48</text:p>
          </table:table-cell>
          <table:table-cell table:formula="of:=NA()" office:value-type="string" office:string-value="" calcext:value-type="error">
            <text:p>#N/A</text:p>
          </table:table-cell>
          <table:table-cell table:formula="of:=IFERROR(VLOOKUP([.$S202];[$特性番号.$A$1:$特性番号.$B$8];2;0);0)" office:value-type="float" office:value="0" calcext:value-type="float">
            <text:p>0</text:p>
          </table:table-cell>
          <table:table-cell office:value-type="string" calcext:value-type="string">
            <text:p>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text:p>
          </table:table-cell>
          <table:table-cell table:style-name="ce8" office:value-type="string" calcext:value-type="string">
            <text:p>冥府発動</text:p>
          </table:table-cell>
          <table:table-cell table:formula="of:=IFERROR(VLOOKUP([.$V202];[$遺業能力番号.$A$1:$遺業能力番号.$B$9];2;0);0)" office:value-type="float" office:value="2" calcext:value-type="float">
            <text:p>2</text:p>
          </table:table-cell>
          <table:table-cell office:value-type="string" calcext:value-type="string">
            <text:p>https://one-draw.jp/ijinden/cardlist/002/card/02_069.png</text:p>
          </table:table-cell>
          <table:table-cell table:formula="of:=CONCATENATE([$JSON.$A$1];[.$C202];[$JSON.$B$1];[.$E202];[$JSON.$C$1];[.$F202];[$JSON.$D$1];IF(ISNA([.$S202]);&quot;null&quot;;&quot;&quot;&quot;&quot;&amp;[.$S202]&amp;&quot;&quot;&quot;&quot;);[$JSON.$E$1];[.$U202];[$JSON.$F$1];IF(ISNA([.$V202]);&quot;null&quot;;&quot;&quot;&quot;&quot;&amp;[.$V202]&amp;&quot;&quot;&quot;&quot;);[$JSON.$G$1];[.$X202];[$JSON.$H$1];[.$H202];[$JSON.$I$1];[.J202];[$JSON.$J$1];[.$L202];[$JSON.$K$1];[.$O202];[$JSON.$L$1];[.$N202];[$JSON.$M$1];[.$R202];[$JSON.$N$1];[.$T202];[$JSON.$O$1];[.$W202];[$JSON.$P$1];[.$A202];[$JSON.$Q$1];[.$B202];[$JSON.$R$1])" office:value-type="string" office:string-value="{&quot;id&quot;:&quot;2-69&quot;,&quot;name&quot;:&quot;スカーレット&quot;,&quot;kana&quot;:&quot;すかーれっと&quot;,&quot;traitText&quot;:null,&quot;ruleText&quot;:&quot;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quot;,&quot;legacyText&quot;:&quot;冥府発動&quot;,&quot;imageUrl&quot;:&quot;https://one-draw.jp/ijinden/cardlist/002/card/02_069.png&quot;,&quot;expansion&quot;:25,&quot;rarity&quot;:1,&quot;type&quot;:3,&quot;level&quot;:3,&quot;color&quot;:8,&quot;term&quot;:48,&quot;trait&quot;:0,&quot;legacy&quot;:2,&quot;orderTable&quot;:201,&quot;orderDeck&quot;:314}," calcext:value-type="string">
            <text:p>{"id":"2-69","name":"スカーレット","kana":"すかーれっと","traitText":null,"ruleText":"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legacyText":"冥府発動","imageUrl":"https://one-draw.jp/ijinden/cardlist/002/card/02_069.png","expansion":25,"rarity":1,"type":3,"level":3,"color":8,"term":48,"trait":0,"legacy":2,"orderTable":201,"orderDeck":314},</text:p>
          </table:table-cell>
          <table:table-cell table:number-columns-repeated="16347"/>
        </table:table-row>
        <table:table-row table:style-name="ro2">
          <table:table-cell office:value-type="float" office:value="202" calcext:value-type="float">
            <text:p>202</text:p>
          </table:table-cell>
          <table:table-cell office:value-type="float" office:value="315" calcext:value-type="float">
            <text:p>315</text:p>
          </table:table-cell>
          <table:table-cell office:value-type="string" calcext:value-type="string">
            <text:p>2-70</text:p>
          </table:table-cell>
          <table:table-cell office:value-type="float" office:value="70" calcext:value-type="float">
            <text:p>70</text:p>
          </table:table-cell>
          <table:table-cell office:value-type="string" calcext:value-type="string">
            <text:p>ピーコック</text:p>
          </table:table-cell>
          <table:table-cell office:value-type="string" calcext:value-type="string">
            <text:p>ぴーこっく</text:p>
          </table:table-cell>
          <table:table-cell office:value-type="string" calcext:value-type="string">
            <text:p>第２弾ブースターパック</text:p>
          </table:table-cell>
          <table:table-cell table:formula="of:=VLOOKUP([.G203];[$収録番号.$A$1:$収録番号.$B$9];2;0)" office:value-type="float" office:value="25" calcext:value-type="float">
            <text:p>25</text:p>
          </table:table-cell>
          <table:table-cell office:value-type="string" calcext:value-type="string">
            <text:p>N</text:p>
          </table:table-cell>
          <table:table-cell table:formula="of:=VLOOKUP([.I203];[$レアリティ番号.$A$1:$レアリティ番号.$B$4];2;0)" office:value-type="float" office:value="1" calcext:value-type="float">
            <text:p>1</text:p>
          </table:table-cell>
          <table:table-cell office:value-type="string" calcext:value-type="string">
            <text:p>マホウ</text:p>
          </table:table-cell>
          <table:table-cell table:formula="of:=VLOOKUP([.K203];[$種類番号.$A$1:$種類番号.$B$4];2;0)" office:value-type="float" office:value="3" calcext:value-type="float">
            <text:p>3</text:p>
          </table:table-cell>
          <table:table-cell office:value-type="string" calcext:value-type="string">
            <text:p>黄</text:p>
          </table:table-cell>
          <table:table-cell table:formula="of:=VLOOKUP([.M203];[$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青魔導</text:p>
          </table:table-cell>
          <table:table-cell table:formula="of:=IFERROR(VLOOKUP([.$Q203];[$能力語番号.$A$1:$能力語番号.$B$10];2;0);0)" office:value-type="float" office:value="80" calcext:value-type="float">
            <text:p>80</text:p>
          </table:table-cell>
          <table:table-cell table:formula="of:=NA()" office:value-type="string" office:string-value="" calcext:value-type="error">
            <text:p>#N/A</text:p>
          </table:table-cell>
          <table:table-cell table:formula="of:=IFERROR(VLOOKUP([.$S203];[$特性番号.$A$1:$特性番号.$B$8];2;0);0)" office:value-type="float" office:value="0" calcext:value-type="float">
            <text:p>0</text:p>
          </table:table-cell>
          <table:table-cell office:value-type="string" calcext:value-type="string">
            <text:p>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text:p>
          </table:table-cell>
          <table:table-cell table:style-name="ce8" office:value-type="string" calcext:value-type="string">
            <text:p>冥府発動</text:p>
          </table:table-cell>
          <table:table-cell table:formula="of:=IFERROR(VLOOKUP([.$V203];[$遺業能力番号.$A$1:$遺業能力番号.$B$9];2;0);0)" office:value-type="float" office:value="2" calcext:value-type="float">
            <text:p>2</text:p>
          </table:table-cell>
          <table:table-cell office:value-type="string" calcext:value-type="string">
            <text:p>https://one-draw.jp/ijinden/cardlist/002/card/02_070.png</text:p>
          </table:table-cell>
          <table:table-cell table:formula="of:=CONCATENATE([$JSON.$A$1];[.$C203];[$JSON.$B$1];[.$E203];[$JSON.$C$1];[.$F203];[$JSON.$D$1];IF(ISNA([.$S203]);&quot;null&quot;;&quot;&quot;&quot;&quot;&amp;[.$S203]&amp;&quot;&quot;&quot;&quot;);[$JSON.$E$1];[.$U203];[$JSON.$F$1];IF(ISNA([.$V203]);&quot;null&quot;;&quot;&quot;&quot;&quot;&amp;[.$V203]&amp;&quot;&quot;&quot;&quot;);[$JSON.$G$1];[.$X203];[$JSON.$H$1];[.$H203];[$JSON.$I$1];[.J203];[$JSON.$J$1];[.$L203];[$JSON.$K$1];[.$O203];[$JSON.$L$1];[.$N203];[$JSON.$M$1];[.$R203];[$JSON.$N$1];[.$T203];[$JSON.$O$1];[.$W203];[$JSON.$P$1];[.$A203];[$JSON.$Q$1];[.$B203];[$JSON.$R$1])" office:value-type="string" office:string-value="{&quot;id&quot;:&quot;2-70&quot;,&quot;name&quot;:&quot;ピーコック&quot;,&quot;kana&quot;:&quot;ぴーこっく&quot;,&quot;traitText&quot;:null,&quot;ruleText&quot;:&quot;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quot;,&quot;legacyText&quot;:&quot;冥府発動&quot;,&quot;imageUrl&quot;:&quot;https://one-draw.jp/ijinden/cardlist/002/card/02_070.png&quot;,&quot;expansion&quot;:25,&quot;rarity&quot;:1,&quot;type&quot;:3,&quot;level&quot;:3,&quot;color&quot;:8,&quot;term&quot;:80,&quot;trait&quot;:0,&quot;legacy&quot;:2,&quot;orderTable&quot;:202,&quot;orderDeck&quot;:315}," calcext:value-type="string">
            <text:p>{"id":"2-70","name":"ピーコック","kana":"ぴーこっく","traitText":null,"ruleText":"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legacyText":"冥府発動","imageUrl":"https://one-draw.jp/ijinden/cardlist/002/card/02_070.png","expansion":25,"rarity":1,"type":3,"level":3,"color":8,"term":80,"trait":0,"legacy":2,"orderTable":202,"orderDeck":315},</text:p>
          </table:table-cell>
          <table:table-cell table:number-columns-repeated="16347"/>
        </table:table-row>
        <table:table-row table:style-name="ro2">
          <table:table-cell office:value-type="float" office:value="203" calcext:value-type="float">
            <text:p>203</text:p>
          </table:table-cell>
          <table:table-cell office:value-type="float" office:value="316" calcext:value-type="float">
            <text:p>316</text:p>
          </table:table-cell>
          <table:table-cell office:value-type="string" calcext:value-type="string">
            <text:p>2-71</text:p>
          </table:table-cell>
          <table:table-cell office:value-type="float" office:value="71" calcext:value-type="float">
            <text:p>71</text:p>
          </table:table-cell>
          <table:table-cell office:value-type="string" calcext:value-type="string">
            <text:p>シャトルーズ</text:p>
          </table:table-cell>
          <table:table-cell office:value-type="string" calcext:value-type="string">
            <text:p>しゃとるーず</text:p>
          </table:table-cell>
          <table:table-cell office:value-type="string" calcext:value-type="string">
            <text:p>第２弾ブースターパック</text:p>
          </table:table-cell>
          <table:table-cell table:formula="of:=VLOOKUP([.G204];[$収録番号.$A$1:$収録番号.$B$9];2;0)" office:value-type="float" office:value="25" calcext:value-type="float">
            <text:p>25</text:p>
          </table:table-cell>
          <table:table-cell office:value-type="string" calcext:value-type="string">
            <text:p>N</text:p>
          </table:table-cell>
          <table:table-cell table:formula="of:=VLOOKUP([.I204];[$レアリティ番号.$A$1:$レアリティ番号.$B$4];2;0)" office:value-type="float" office:value="1" calcext:value-type="float">
            <text:p>1</text:p>
          </table:table-cell>
          <table:table-cell office:value-type="string" calcext:value-type="string">
            <text:p>マホウ</text:p>
          </table:table-cell>
          <table:table-cell table:formula="of:=VLOOKUP([.K204];[$種類番号.$A$1:$種類番号.$B$4];2;0)" office:value-type="float" office:value="3" calcext:value-type="float">
            <text:p>3</text:p>
          </table:table-cell>
          <table:table-cell office:value-type="string" calcext:value-type="string">
            <text:p>黄</text:p>
          </table:table-cell>
          <table:table-cell table:formula="of:=VLOOKUP([.M204];[$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緑魔導</text:p>
          </table:table-cell>
          <table:table-cell table:formula="of:=IFERROR(VLOOKUP([.$Q204];[$能力語番号.$A$1:$能力語番号.$B$10];2;0);0)" office:value-type="float" office:value="144" calcext:value-type="float">
            <text:p>144</text:p>
          </table:table-cell>
          <table:table-cell table:formula="of:=NA()" office:value-type="string" office:string-value="" calcext:value-type="error">
            <text:p>#N/A</text:p>
          </table:table-cell>
          <table:table-cell table:formula="of:=IFERROR(VLOOKUP([.$S204];[$特性番号.$A$1:$特性番号.$B$8];2;0);0)" office:value-type="float" office:value="0" calcext:value-type="float">
            <text:p>0</text:p>
          </table:table-cell>
          <table:table-cell office:value-type="string" calcext:value-type="string">
            <text:p>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text:p>
          </table:table-cell>
          <table:table-cell table:style-name="ce8" office:value-type="string" calcext:value-type="string">
            <text:p>冥府発動</text:p>
          </table:table-cell>
          <table:table-cell table:formula="of:=IFERROR(VLOOKUP([.$V204];[$遺業能力番号.$A$1:$遺業能力番号.$B$9];2;0);0)" office:value-type="float" office:value="2" calcext:value-type="float">
            <text:p>2</text:p>
          </table:table-cell>
          <table:table-cell office:value-type="string" calcext:value-type="string">
            <text:p>https://one-draw.jp/ijinden/cardlist/002/card/02_071.png</text:p>
          </table:table-cell>
          <table:table-cell table:formula="of:=CONCATENATE([$JSON.$A$1];[.$C204];[$JSON.$B$1];[.$E204];[$JSON.$C$1];[.$F204];[$JSON.$D$1];IF(ISNA([.$S204]);&quot;null&quot;;&quot;&quot;&quot;&quot;&amp;[.$S204]&amp;&quot;&quot;&quot;&quot;);[$JSON.$E$1];[.$U204];[$JSON.$F$1];IF(ISNA([.$V204]);&quot;null&quot;;&quot;&quot;&quot;&quot;&amp;[.$V204]&amp;&quot;&quot;&quot;&quot;);[$JSON.$G$1];[.$X204];[$JSON.$H$1];[.$H204];[$JSON.$I$1];[.J204];[$JSON.$J$1];[.$L204];[$JSON.$K$1];[.$O204];[$JSON.$L$1];[.$N204];[$JSON.$M$1];[.$R204];[$JSON.$N$1];[.$T204];[$JSON.$O$1];[.$W204];[$JSON.$P$1];[.$A204];[$JSON.$Q$1];[.$B204];[$JSON.$R$1])" office:value-type="string" office:string-value="{&quot;id&quot;:&quot;2-71&quot;,&quot;name&quot;:&quot;シャトルーズ&quot;,&quot;kana&quot;:&quot;しゃとるーず&quot;,&quot;traitText&quot;:null,&quot;ruleText&quot;:&quot;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quot;,&quot;legacyText&quot;:&quot;冥府発動&quot;,&quot;imageUrl&quot;:&quot;https://one-draw.jp/ijinden/cardlist/002/card/02_071.png&quot;,&quot;expansion&quot;:25,&quot;rarity&quot;:1,&quot;type&quot;:3,&quot;level&quot;:3,&quot;color&quot;:8,&quot;term&quot;:144,&quot;trait&quot;:0,&quot;legacy&quot;:2,&quot;orderTable&quot;:203,&quot;orderDeck&quot;:316}," calcext:value-type="string">
            <text:p>{"id":"2-71","name":"シャトルーズ","kana":"しゃとるーず","traitText":null,"ruleText":"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legacyText":"冥府発動","imageUrl":"https://one-draw.jp/ijinden/cardlist/002/card/02_071.png","expansion":25,"rarity":1,"type":3,"level":3,"color":8,"term":144,"trait":0,"legacy":2,"orderTable":203,"orderDeck":316},</text:p>
          </table:table-cell>
          <table:table-cell table:number-columns-repeated="16347"/>
        </table:table-row>
        <table:table-row table:style-name="ro2">
          <table:table-cell office:value-type="float" office:value="204" calcext:value-type="float">
            <text:p>204</text:p>
          </table:table-cell>
          <table:table-cell office:value-type="float" office:value="362" calcext:value-type="float">
            <text:p>362</text:p>
          </table:table-cell>
          <table:table-cell office:value-type="string" calcext:value-type="string">
            <text:p>2-72</text:p>
          </table:table-cell>
          <table:table-cell office:value-type="float" office:value="72" calcext:value-type="float">
            <text:p>72</text:p>
          </table:table-cell>
          <table:table-cell office:value-type="string" calcext:value-type="string">
            <text:p>サンドグラス</text:p>
          </table:table-cell>
          <table:table-cell office:value-type="string" calcext:value-type="string">
            <text:p>さんどぐらす</text:p>
          </table:table-cell>
          <table:table-cell office:value-type="string" calcext:value-type="string">
            <text:p>第２弾ブースターパック</text:p>
          </table:table-cell>
          <table:table-cell table:formula="of:=VLOOKUP([.G205];[$収録番号.$A$1:$収録番号.$B$9];2;0)" office:value-type="float" office:value="25" calcext:value-type="float">
            <text:p>25</text:p>
          </table:table-cell>
          <table:table-cell office:value-type="string" calcext:value-type="string">
            <text:p>N</text:p>
          </table:table-cell>
          <table:table-cell table:formula="of:=VLOOKUP([.I205];[$レアリティ番号.$A$1:$レアリティ番号.$B$4];2;0)" office:value-type="float" office:value="1" calcext:value-type="float">
            <text:p>1</text:p>
          </table:table-cell>
          <table:table-cell office:value-type="string" calcext:value-type="string">
            <text:p>マリョク</text:p>
          </table:table-cell>
          <table:table-cell table:formula="of:=VLOOKUP([.K205];[$種類番号.$A$1:$種類番号.$B$4];2;0)" office:value-type="float" office:value="4" calcext:value-type="float">
            <text:p>4</text:p>
          </table:table-cell>
          <table:table-cell office:value-type="string" calcext:value-type="string">
            <text:p>黄</text:p>
          </table:table-cell>
          <table:table-cell table:formula="of:=VLOOKUP([.M205];[$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0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5];[$特性番号.$A$1:$特性番号.$B$8];2;0);0)" office:value-type="float" office:value="0" calcext:value-type="float">
            <text:p>0</text:p>
          </table:table-cell>
          <table:table-cell office:value-type="string" calcext:value-type="string">
            <text:p>魔力ゾーンに置かれたとき、1ドローする。</text:p>
          </table:table-cell>
          <table:table-cell table:style-name="ce8" table:formula="of:=NA()" office:value-type="string" office:string-value="" calcext:value-type="error">
            <text:p>#N/A</text:p>
          </table:table-cell>
          <table:table-cell table:formula="of:=IFERROR(VLOOKUP([.$V205];[$遺業能力番号.$A$1:$遺業能力番号.$B$9];2;0);0)" office:value-type="float" office:value="0" calcext:value-type="float">
            <text:p>0</text:p>
          </table:table-cell>
          <table:table-cell office:value-type="string" calcext:value-type="string">
            <text:p>https://one-draw.jp/ijinden/cardlist/002/card/02_072.png</text:p>
          </table:table-cell>
          <table:table-cell table:formula="of:=CONCATENATE([$JSON.$A$1];[.$C205];[$JSON.$B$1];[.$E205];[$JSON.$C$1];[.$F205];[$JSON.$D$1];IF(ISNA([.$S205]);&quot;null&quot;;&quot;&quot;&quot;&quot;&amp;[.$S205]&amp;&quot;&quot;&quot;&quot;);[$JSON.$E$1];[.$U205];[$JSON.$F$1];IF(ISNA([.$V205]);&quot;null&quot;;&quot;&quot;&quot;&quot;&amp;[.$V205]&amp;&quot;&quot;&quot;&quot;);[$JSON.$G$1];[.$X205];[$JSON.$H$1];[.$H205];[$JSON.$I$1];[.J205];[$JSON.$J$1];[.$L205];[$JSON.$K$1];[.$O205];[$JSON.$L$1];[.$N205];[$JSON.$M$1];[.$R205];[$JSON.$N$1];[.$T205];[$JSON.$O$1];[.$W205];[$JSON.$P$1];[.$A205];[$JSON.$Q$1];[.$B205];[$JSON.$R$1])" office:value-type="string" office:string-value="{&quot;id&quot;:&quot;2-72&quot;,&quot;name&quot;:&quot;サンドグラス&quot;,&quot;kana&quot;:&quot;さんどぐらす&quot;,&quot;traitText&quot;:null,&quot;ruleText&quot;:&quot;魔力ゾーンに置かれたとき、1ドローする。&quot;,&quot;legacyText&quot;:null,&quot;imageUrl&quot;:&quot;https://one-draw.jp/ijinden/cardlist/002/card/02_072.png&quot;,&quot;expansion&quot;:25,&quot;rarity&quot;:1,&quot;type&quot;:4,&quot;level&quot;:1,&quot;color&quot;:8,&quot;term&quot;:0,&quot;trait&quot;:0,&quot;legacy&quot;:0,&quot;orderTable&quot;:204,&quot;orderDeck&quot;:362}," calcext:value-type="string">
            <text:p>{"id":"2-72","name":"サンドグラス","kana":"さんどぐらす","traitText":null,"ruleText":"魔力ゾーンに置かれたとき、1ドローする。","legacyText":null,"imageUrl":"https://one-draw.jp/ijinden/cardlist/002/card/02_072.png","expansion":25,"rarity":1,"type":4,"level":1,"color":8,"term":0,"trait":0,"legacy":0,"orderTable":204,"orderDeck":362},</text:p>
          </table:table-cell>
          <table:table-cell table:number-columns-repeated="16347"/>
        </table:table-row>
        <table:table-row table:style-name="ro2">
          <table:table-cell office:value-type="float" office:value="205" calcext:value-type="float">
            <text:p>205</text:p>
          </table:table-cell>
          <table:table-cell office:value-type="float" office:value="363" calcext:value-type="float">
            <text:p>363</text:p>
          </table:table-cell>
          <table:table-cell office:value-type="string" calcext:value-type="string">
            <text:p>2-73</text:p>
          </table:table-cell>
          <table:table-cell office:value-type="float" office:value="73" calcext:value-type="float">
            <text:p>73</text:p>
          </table:table-cell>
          <table:table-cell office:value-type="string" calcext:value-type="string">
            <text:p>シルククローク</text:p>
          </table:table-cell>
          <table:table-cell office:value-type="string" calcext:value-type="string">
            <text:p>しるくくろーく</text:p>
          </table:table-cell>
          <table:table-cell office:value-type="string" calcext:value-type="string">
            <text:p>第２弾ブースターパック</text:p>
          </table:table-cell>
          <table:table-cell table:formula="of:=VLOOKUP([.G206];[$収録番号.$A$1:$収録番号.$B$9];2;0)" office:value-type="float" office:value="25" calcext:value-type="float">
            <text:p>25</text:p>
          </table:table-cell>
          <table:table-cell office:value-type="string" calcext:value-type="string">
            <text:p>N</text:p>
          </table:table-cell>
          <table:table-cell table:formula="of:=VLOOKUP([.I206];[$レアリティ番号.$A$1:$レアリティ番号.$B$4];2;0)" office:value-type="float" office:value="1" calcext:value-type="float">
            <text:p>1</text:p>
          </table:table-cell>
          <table:table-cell office:value-type="string" calcext:value-type="string">
            <text:p>マリョク</text:p>
          </table:table-cell>
          <table:table-cell table:formula="of:=VLOOKUP([.K206];[$種類番号.$A$1:$種類番号.$B$4];2;0)" office:value-type="float" office:value="4" calcext:value-type="float">
            <text:p>4</text:p>
          </table:table-cell>
          <table:table-cell office:value-type="string" calcext:value-type="string">
            <text:p>黄</text:p>
          </table:table-cell>
          <table:table-cell table:formula="of:=VLOOKUP([.M206];[$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0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6];[$特性番号.$A$1:$特性番号.$B$8];2;0);0)" office:value-type="float" office:value="0" calcext:value-type="float">
            <text:p>0</text:p>
          </table:table-cell>
          <table:table-cell office:value-type="string" calcext:value-type="string">
            <text:p>イジン召喚によってイジンが自分の戦場に置かれる際、魔力ゾーンにあるこれを、そのイジンに装備させてもよい。¶装備 : 「色：黄」 これの色1つにつき「パワー+500」を得る。</text:p>
          </table:table-cell>
          <table:table-cell table:style-name="ce8" office:value-type="string" calcext:value-type="string">
            <text:p>復元</text:p>
          </table:table-cell>
          <table:table-cell table:formula="of:=IFERROR(VLOOKUP([.$V206];[$遺業能力番号.$A$1:$遺業能力番号.$B$9];2;0);0)" office:value-type="float" office:value="3" calcext:value-type="float">
            <text:p>3</text:p>
          </table:table-cell>
          <table:table-cell office:value-type="string" calcext:value-type="string">
            <text:p>https://one-draw.jp/ijinden/cardlist/002/card/02_073.png</text:p>
          </table:table-cell>
          <table:table-cell table:formula="of:=CONCATENATE([$JSON.$A$1];[.$C206];[$JSON.$B$1];[.$E206];[$JSON.$C$1];[.$F206];[$JSON.$D$1];IF(ISNA([.$S206]);&quot;null&quot;;&quot;&quot;&quot;&quot;&amp;[.$S206]&amp;&quot;&quot;&quot;&quot;);[$JSON.$E$1];[.$U206];[$JSON.$F$1];IF(ISNA([.$V206]);&quot;null&quot;;&quot;&quot;&quot;&quot;&amp;[.$V206]&amp;&quot;&quot;&quot;&quot;);[$JSON.$G$1];[.$X206];[$JSON.$H$1];[.$H206];[$JSON.$I$1];[.J206];[$JSON.$J$1];[.$L206];[$JSON.$K$1];[.$O206];[$JSON.$L$1];[.$N206];[$JSON.$M$1];[.$R206];[$JSON.$N$1];[.$T206];[$JSON.$O$1];[.$W206];[$JSON.$P$1];[.$A206];[$JSON.$Q$1];[.$B206];[$JSON.$R$1])" office:value-type="string" office:string-value="{&quot;id&quot;:&quot;2-73&quot;,&quot;name&quot;:&quot;シルククローク&quot;,&quot;kana&quot;:&quot;しるくくろーく&quot;,&quot;traitText&quot;:null,&quot;ruleText&quot;:&quot;イジン召喚によってイジンが自分の戦場に置かれる際、魔力ゾーンにあるこれを、そのイジンに装備させてもよい。¶装備 : 「色：黄」 これの色1つにつき「パワー+500」を得る。&quot;,&quot;legacyText&quot;:&quot;復元&quot;,&quot;imageUrl&quot;:&quot;https://one-draw.jp/ijinden/cardlist/002/card/02_073.png&quot;,&quot;expansion&quot;:25,&quot;rarity&quot;:1,&quot;type&quot;:4,&quot;level&quot;:1,&quot;color&quot;:8,&quot;term&quot;:0,&quot;trait&quot;:0,&quot;legacy&quot;:3,&quot;orderTable&quot;:205,&quot;orderDeck&quot;:363}," calcext:value-type="string">
            <text:p>{"id":"2-73","name":"シルククローク","kana":"しるくくろーく","traitText":null,"ruleText":"イジン召喚によってイジンが自分の戦場に置かれる際、魔力ゾーンにあるこれを、そのイジンに装備させてもよい。¶装備 : 「色：黄」 これの色1つにつき「パワー+500」を得る。","legacyText":"復元","imageUrl":"https://one-draw.jp/ijinden/cardlist/002/card/02_073.png","expansion":25,"rarity":1,"type":4,"level":1,"color":8,"term":0,"trait":0,"legacy":3,"orderTable":205,"orderDeck":363},</text:p>
          </table:table-cell>
          <table:table-cell table:number-columns-repeated="16347"/>
        </table:table-row>
        <table:table-row table:style-name="ro2">
          <table:table-cell office:value-type="float" office:value="206" calcext:value-type="float">
            <text:p>206</text:p>
          </table:table-cell>
          <table:table-cell office:value-type="float" office:value="382" calcext:value-type="float">
            <text:p>382</text:p>
          </table:table-cell>
          <table:table-cell office:value-type="string" calcext:value-type="string">
            <text:p>2-74</text:p>
          </table:table-cell>
          <table:table-cell office:value-type="float" office:value="74" calcext:value-type="float">
            <text:p>74</text:p>
          </table:table-cell>
          <table:table-cell office:value-type="string" calcext:value-type="string">
            <text:p>イエローオーブ</text:p>
          </table:table-cell>
          <table:table-cell office:value-type="string" calcext:value-type="string">
            <text:p>いえろーおーぶ</text:p>
          </table:table-cell>
          <table:table-cell office:value-type="string" calcext:value-type="string">
            <text:p>第２弾ブースターパック</text:p>
          </table:table-cell>
          <table:table-cell table:formula="of:=VLOOKUP([.G207];[$収録番号.$A$1:$収録番号.$B$9];2;0)" office:value-type="float" office:value="25" calcext:value-type="float">
            <text:p>25</text:p>
          </table:table-cell>
          <table:table-cell office:value-type="string" calcext:value-type="string">
            <text:p>R</text:p>
          </table:table-cell>
          <table:table-cell table:formula="of:=VLOOKUP([.I207];[$レアリティ番号.$A$1:$レアリティ番号.$B$4];2;0)" office:value-type="float" office:value="2" calcext:value-type="float">
            <text:p>2</text:p>
          </table:table-cell>
          <table:table-cell office:value-type="string" calcext:value-type="string">
            <text:p>マリョク</text:p>
          </table:table-cell>
          <table:table-cell table:formula="of:=VLOOKUP([.K207];[$種類番号.$A$1:$種類番号.$B$4];2;0)" office:value-type="float" office:value="4" calcext:value-type="float">
            <text:p>4</text:p>
          </table:table-cell>
          <table:table-cell office:value-type="string" calcext:value-type="string">
            <text:p>黄</text:p>
          </table:table-cell>
          <table:table-cell table:formula="of:=VLOOKUP([.M207];[$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0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7];[$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V207];[$遺業能力番号.$A$1:$遺業能力番号.$B$9];2;0);0)" office:value-type="float" office:value="3" calcext:value-type="float">
            <text:p>3</text:p>
          </table:table-cell>
          <table:table-cell office:value-type="string" calcext:value-type="string">
            <text:p>https://one-draw.jp/ijinden/cardlist/002/card/02_074.png</text:p>
          </table:table-cell>
          <table:table-cell table:formula="of:=CONCATENATE([$JSON.$A$1];[.$C207];[$JSON.$B$1];[.$E207];[$JSON.$C$1];[.$F207];[$JSON.$D$1];IF(ISNA([.$S207]);&quot;null&quot;;&quot;&quot;&quot;&quot;&amp;[.$S207]&amp;&quot;&quot;&quot;&quot;);[$JSON.$E$1];[.$U207];[$JSON.$F$1];IF(ISNA([.$V207]);&quot;null&quot;;&quot;&quot;&quot;&quot;&amp;[.$V207]&amp;&quot;&quot;&quot;&quot;);[$JSON.$G$1];[.$X207];[$JSON.$H$1];[.$H207];[$JSON.$I$1];[.J207];[$JSON.$J$1];[.$L207];[$JSON.$K$1];[.$O207];[$JSON.$L$1];[.$N207];[$JSON.$M$1];[.$R207];[$JSON.$N$1];[.$T207];[$JSON.$O$1];[.$W207];[$JSON.$P$1];[.$A207];[$JSON.$Q$1];[.$B207];[$JSON.$R$1])" office:value-type="string" office:string-value="{&quot;id&quot;:&quot;2-74&quot;,&quot;name&quot;:&quot;イエローオーブ&quot;,&quot;kana&quot;:&quot;いえろーおーぶ&quot;,&quot;traitText&quot;:null,&quot;ruleText&quot;:&quot;&quot;,&quot;legacyText&quot;:&quot;復元&quot;,&quot;imageUrl&quot;:&quot;https://one-draw.jp/ijinden/cardlist/002/card/02_074.png&quot;,&quot;expansion&quot;:25,&quot;rarity&quot;:2,&quot;type&quot;:4,&quot;level&quot;:2,&quot;color&quot;:8,&quot;term&quot;:0,&quot;trait&quot;:0,&quot;legacy&quot;:3,&quot;orderTable&quot;:206,&quot;orderDeck&quot;:382}," calcext:value-type="string">
            <text:p>{"id":"2-74","name":"イエローオーブ","kana":"いえろーおーぶ","traitText":null,"ruleText":"","legacyText":"復元","imageUrl":"https://one-draw.jp/ijinden/cardlist/002/card/02_074.png","expansion":25,"rarity":2,"type":4,"level":2,"color":8,"term":0,"trait":0,"legacy":3,"orderTable":206,"orderDeck":382},</text:p>
          </table:table-cell>
          <table:table-cell table:number-columns-repeated="16347"/>
        </table:table-row>
        <table:table-row table:style-name="ro2">
          <table:table-cell office:value-type="float" office:value="207" calcext:value-type="float">
            <text:p>207</text:p>
          </table:table-cell>
          <table:table-cell office:value-type="float" office:value="372" calcext:value-type="float">
            <text:p>372</text:p>
          </table:table-cell>
          <table:table-cell office:value-type="string" calcext:value-type="string">
            <text:p>2-75</text:p>
          </table:table-cell>
          <table:table-cell office:value-type="float" office:value="75" calcext:value-type="float">
            <text:p>75</text:p>
          </table:table-cell>
          <table:table-cell office:value-type="string" calcext:value-type="string">
            <text:p>RYマーブルストーン</text:p>
          </table:table-cell>
          <table:table-cell office:value-type="string" calcext:value-type="string">
            <text:p>ryまーぶるすとーん</text:p>
          </table:table-cell>
          <table:table-cell office:value-type="string" calcext:value-type="string">
            <text:p>第２弾ブースターパック</text:p>
          </table:table-cell>
          <table:table-cell table:formula="of:=VLOOKUP([.G208];[$収録番号.$A$1:$収録番号.$B$9];2;0)" office:value-type="float" office:value="25" calcext:value-type="float">
            <text:p>25</text:p>
          </table:table-cell>
          <table:table-cell office:value-type="string" calcext:value-type="string">
            <text:p>N</text:p>
          </table:table-cell>
          <table:table-cell table:formula="of:=VLOOKUP([.I208];[$レアリティ番号.$A$1:$レアリティ番号.$B$4];2;0)" office:value-type="float" office:value="1" calcext:value-type="float">
            <text:p>1</text:p>
          </table:table-cell>
          <table:table-cell office:value-type="string" calcext:value-type="string">
            <text:p>マリョク</text:p>
          </table:table-cell>
          <table:table-cell table:formula="of:=VLOOKUP([.K208];[$種類番号.$A$1:$種類番号.$B$4];2;0)" office:value-type="float" office:value="4" calcext:value-type="float">
            <text:p>4</text:p>
          </table:table-cell>
          <table:table-cell office:value-type="string" calcext:value-type="string">
            <text:p>赤黄</text:p>
          </table:table-cell>
          <table:table-cell table:formula="of:=VLOOKUP([.M208];[$色番号.$A$1:$色番号.$B$10];2;0)" office:value-type="float" office:value="41" calcext:value-type="float">
            <text:p>4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0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8];[$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V208];[$遺業能力番号.$A$1:$遺業能力番号.$B$9];2;0);0)" office:value-type="float" office:value="3" calcext:value-type="float">
            <text:p>3</text:p>
          </table:table-cell>
          <table:table-cell office:value-type="string" calcext:value-type="string">
            <text:p>https://one-draw.jp/ijinden/cardlist/002/card/02_075.png</text:p>
          </table:table-cell>
          <table:table-cell table:formula="of:=CONCATENATE([$JSON.$A$1];[.$C208];[$JSON.$B$1];[.$E208];[$JSON.$C$1];[.$F208];[$JSON.$D$1];IF(ISNA([.$S208]);&quot;null&quot;;&quot;&quot;&quot;&quot;&amp;[.$S208]&amp;&quot;&quot;&quot;&quot;);[$JSON.$E$1];[.$U208];[$JSON.$F$1];IF(ISNA([.$V208]);&quot;null&quot;;&quot;&quot;&quot;&quot;&amp;[.$V208]&amp;&quot;&quot;&quot;&quot;);[$JSON.$G$1];[.$X208];[$JSON.$H$1];[.$H208];[$JSON.$I$1];[.J208];[$JSON.$J$1];[.$L208];[$JSON.$K$1];[.$O208];[$JSON.$L$1];[.$N208];[$JSON.$M$1];[.$R208];[$JSON.$N$1];[.$T208];[$JSON.$O$1];[.$W208];[$JSON.$P$1];[.$A208];[$JSON.$Q$1];[.$B208];[$JSON.$R$1])" office:value-type="string" office:string-value="{&quot;id&quot;:&quot;2-75&quot;,&quot;name&quot;:&quot;RYマーブルストーン&quot;,&quot;kana&quot;:&quot;ryまーぶるすとーん&quot;,&quot;traitText&quot;:null,&quot;ruleText&quot;:&quot;&quot;,&quot;legacyText&quot;:&quot;復元&quot;,&quot;imageUrl&quot;:&quot;https://one-draw.jp/ijinden/cardlist/002/card/02_075.png&quot;,&quot;expansion&quot;:25,&quot;rarity&quot;:1,&quot;type&quot;:4,&quot;level&quot;:1,&quot;color&quot;:41,&quot;term&quot;:0,&quot;trait&quot;:0,&quot;legacy&quot;:3,&quot;orderTable&quot;:207,&quot;orderDeck&quot;:372}," calcext:value-type="string">
            <text:p>{"id":"2-75","name":"RYマーブルストーン","kana":"ryまーぶるすとーん","traitText":null,"ruleText":"","legacyText":"復元","imageUrl":"https://one-draw.jp/ijinden/cardlist/002/card/02_075.png","expansion":25,"rarity":1,"type":4,"level":1,"color":41,"term":0,"trait":0,"legacy":3,"orderTable":207,"orderDeck":372},</text:p>
          </table:table-cell>
          <table:table-cell table:number-columns-repeated="16347"/>
        </table:table-row>
        <table:table-row table:style-name="ro2">
          <table:table-cell office:value-type="float" office:value="208" calcext:value-type="float">
            <text:p>208</text:p>
          </table:table-cell>
          <table:table-cell office:value-type="float" office:value="373" calcext:value-type="float">
            <text:p>373</text:p>
          </table:table-cell>
          <table:table-cell office:value-type="string" calcext:value-type="string">
            <text:p>2-76</text:p>
          </table:table-cell>
          <table:table-cell office:value-type="float" office:value="76" calcext:value-type="float">
            <text:p>76</text:p>
          </table:table-cell>
          <table:table-cell office:value-type="string" calcext:value-type="string">
            <text:p>BYマーブルストーン</text:p>
          </table:table-cell>
          <table:table-cell office:value-type="string" calcext:value-type="string">
            <text:p>byまーぶるすとーん</text:p>
          </table:table-cell>
          <table:table-cell office:value-type="string" calcext:value-type="string">
            <text:p>第２弾ブースターパック</text:p>
          </table:table-cell>
          <table:table-cell table:formula="of:=VLOOKUP([.G209];[$収録番号.$A$1:$収録番号.$B$9];2;0)" office:value-type="float" office:value="25" calcext:value-type="float">
            <text:p>25</text:p>
          </table:table-cell>
          <table:table-cell office:value-type="string" calcext:value-type="string">
            <text:p>N</text:p>
          </table:table-cell>
          <table:table-cell table:formula="of:=VLOOKUP([.I209];[$レアリティ番号.$A$1:$レアリティ番号.$B$4];2;0)" office:value-type="float" office:value="1" calcext:value-type="float">
            <text:p>1</text:p>
          </table:table-cell>
          <table:table-cell office:value-type="string" calcext:value-type="string">
            <text:p>マリョク</text:p>
          </table:table-cell>
          <table:table-cell table:formula="of:=VLOOKUP([.K209];[$種類番号.$A$1:$種類番号.$B$4];2;0)" office:value-type="float" office:value="4" calcext:value-type="float">
            <text:p>4</text:p>
          </table:table-cell>
          <table:table-cell office:value-type="string" calcext:value-type="string">
            <text:p>青黄</text:p>
          </table:table-cell>
          <table:table-cell table:formula="of:=VLOOKUP([.M209];[$色番号.$A$1:$色番号.$B$10];2;0)" office:value-type="float" office:value="42" calcext:value-type="float">
            <text:p>4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0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9];[$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V209];[$遺業能力番号.$A$1:$遺業能力番号.$B$9];2;0);0)" office:value-type="float" office:value="3" calcext:value-type="float">
            <text:p>3</text:p>
          </table:table-cell>
          <table:table-cell office:value-type="string" calcext:value-type="string">
            <text:p>https://one-draw.jp/ijinden/cardlist/002/card/02_076.png</text:p>
          </table:table-cell>
          <table:table-cell table:formula="of:=CONCATENATE([$JSON.$A$1];[.$C209];[$JSON.$B$1];[.$E209];[$JSON.$C$1];[.$F209];[$JSON.$D$1];IF(ISNA([.$S209]);&quot;null&quot;;&quot;&quot;&quot;&quot;&amp;[.$S209]&amp;&quot;&quot;&quot;&quot;);[$JSON.$E$1];[.$U209];[$JSON.$F$1];IF(ISNA([.$V209]);&quot;null&quot;;&quot;&quot;&quot;&quot;&amp;[.$V209]&amp;&quot;&quot;&quot;&quot;);[$JSON.$G$1];[.$X209];[$JSON.$H$1];[.$H209];[$JSON.$I$1];[.J209];[$JSON.$J$1];[.$L209];[$JSON.$K$1];[.$O209];[$JSON.$L$1];[.$N209];[$JSON.$M$1];[.$R209];[$JSON.$N$1];[.$T209];[$JSON.$O$1];[.$W209];[$JSON.$P$1];[.$A209];[$JSON.$Q$1];[.$B209];[$JSON.$R$1])" office:value-type="string" office:string-value="{&quot;id&quot;:&quot;2-76&quot;,&quot;name&quot;:&quot;BYマーブルストーン&quot;,&quot;kana&quot;:&quot;byまーぶるすとーん&quot;,&quot;traitText&quot;:null,&quot;ruleText&quot;:&quot;&quot;,&quot;legacyText&quot;:&quot;復元&quot;,&quot;imageUrl&quot;:&quot;https://one-draw.jp/ijinden/cardlist/002/card/02_076.png&quot;,&quot;expansion&quot;:25,&quot;rarity&quot;:1,&quot;type&quot;:4,&quot;level&quot;:1,&quot;color&quot;:42,&quot;term&quot;:0,&quot;trait&quot;:0,&quot;legacy&quot;:3,&quot;orderTable&quot;:208,&quot;orderDeck&quot;:373}," calcext:value-type="string">
            <text:p>{"id":"2-76","name":"BYマーブルストーン","kana":"byまーぶるすとーん","traitText":null,"ruleText":"","legacyText":"復元","imageUrl":"https://one-draw.jp/ijinden/cardlist/002/card/02_076.png","expansion":25,"rarity":1,"type":4,"level":1,"color":42,"term":0,"trait":0,"legacy":3,"orderTable":208,"orderDeck":373},</text:p>
          </table:table-cell>
          <table:table-cell table:number-columns-repeated="16347"/>
        </table:table-row>
        <table:table-row table:style-name="ro2">
          <table:table-cell office:value-type="float" office:value="209" calcext:value-type="float">
            <text:p>209</text:p>
          </table:table-cell>
          <table:table-cell office:value-type="float" office:value="374" calcext:value-type="float">
            <text:p>374</text:p>
          </table:table-cell>
          <table:table-cell office:value-type="string" calcext:value-type="string">
            <text:p>2-77</text:p>
          </table:table-cell>
          <table:table-cell office:value-type="float" office:value="77" calcext:value-type="float">
            <text:p>77</text:p>
          </table:table-cell>
          <table:table-cell office:value-type="string" calcext:value-type="string">
            <text:p>GYマーブルストーン</text:p>
          </table:table-cell>
          <table:table-cell office:value-type="string" calcext:value-type="string">
            <text:p>gyまーぶるすとーん</text:p>
          </table:table-cell>
          <table:table-cell office:value-type="string" calcext:value-type="string">
            <text:p>第２弾ブースターパック</text:p>
          </table:table-cell>
          <table:table-cell table:formula="of:=VLOOKUP([.G210];[$収録番号.$A$1:$収録番号.$B$9];2;0)" office:value-type="float" office:value="25" calcext:value-type="float">
            <text:p>25</text:p>
          </table:table-cell>
          <table:table-cell office:value-type="string" calcext:value-type="string">
            <text:p>N</text:p>
          </table:table-cell>
          <table:table-cell table:formula="of:=VLOOKUP([.I210];[$レアリティ番号.$A$1:$レアリティ番号.$B$4];2;0)" office:value-type="float" office:value="1" calcext:value-type="float">
            <text:p>1</text:p>
          </table:table-cell>
          <table:table-cell office:value-type="string" calcext:value-type="string">
            <text:p>マリョク</text:p>
          </table:table-cell>
          <table:table-cell table:formula="of:=VLOOKUP([.K210];[$種類番号.$A$1:$種類番号.$B$4];2;0)" office:value-type="float" office:value="4" calcext:value-type="float">
            <text:p>4</text:p>
          </table:table-cell>
          <table:table-cell office:value-type="string" calcext:value-type="string">
            <text:p>緑黄</text:p>
          </table:table-cell>
          <table:table-cell table:formula="of:=VLOOKUP([.M210];[$色番号.$A$1:$色番号.$B$10];2;0)" office:value-type="float" office:value="44" calcext:value-type="float">
            <text:p>4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0];[$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V210];[$遺業能力番号.$A$1:$遺業能力番号.$B$9];2;0);0)" office:value-type="float" office:value="3" calcext:value-type="float">
            <text:p>3</text:p>
          </table:table-cell>
          <table:table-cell office:value-type="string" calcext:value-type="string">
            <text:p>https://one-draw.jp/ijinden/cardlist/002/card/02_077.png</text:p>
          </table:table-cell>
          <table:table-cell table:formula="of:=CONCATENATE([$JSON.$A$1];[.$C210];[$JSON.$B$1];[.$E210];[$JSON.$C$1];[.$F210];[$JSON.$D$1];IF(ISNA([.$S210]);&quot;null&quot;;&quot;&quot;&quot;&quot;&amp;[.$S210]&amp;&quot;&quot;&quot;&quot;);[$JSON.$E$1];[.$U210];[$JSON.$F$1];IF(ISNA([.$V210]);&quot;null&quot;;&quot;&quot;&quot;&quot;&amp;[.$V210]&amp;&quot;&quot;&quot;&quot;);[$JSON.$G$1];[.$X210];[$JSON.$H$1];[.$H210];[$JSON.$I$1];[.J210];[$JSON.$J$1];[.$L210];[$JSON.$K$1];[.$O210];[$JSON.$L$1];[.$N210];[$JSON.$M$1];[.$R210];[$JSON.$N$1];[.$T210];[$JSON.$O$1];[.$W210];[$JSON.$P$1];[.$A210];[$JSON.$Q$1];[.$B210];[$JSON.$R$1])" office:value-type="string" office:string-value="{&quot;id&quot;:&quot;2-77&quot;,&quot;name&quot;:&quot;GYマーブルストーン&quot;,&quot;kana&quot;:&quot;gyまーぶるすとーん&quot;,&quot;traitText&quot;:null,&quot;ruleText&quot;:&quot;&quot;,&quot;legacyText&quot;:&quot;復元&quot;,&quot;imageUrl&quot;:&quot;https://one-draw.jp/ijinden/cardlist/002/card/02_077.png&quot;,&quot;expansion&quot;:25,&quot;rarity&quot;:1,&quot;type&quot;:4,&quot;level&quot;:1,&quot;color&quot;:44,&quot;term&quot;:0,&quot;trait&quot;:0,&quot;legacy&quot;:3,&quot;orderTable&quot;:209,&quot;orderDeck&quot;:374}," calcext:value-type="string">
            <text:p>{"id":"2-77","name":"GYマーブルストーン","kana":"gyまーぶるすとーん","traitText":null,"ruleText":"","legacyText":"復元","imageUrl":"https://one-draw.jp/ijinden/cardlist/002/card/02_077.png","expansion":25,"rarity":1,"type":4,"level":1,"color":44,"term":0,"trait":0,"legacy":3,"orderTable":209,"orderDeck":374},</text:p>
          </table:table-cell>
          <table:table-cell table:number-columns-repeated="16347"/>
        </table:table-row>
        <table:table-row table:style-name="ro2">
          <table:table-cell office:value-type="float" office:value="210" calcext:value-type="float">
            <text:p>210</text:p>
          </table:table-cell>
          <table:table-cell office:value-type="float" office:value="384" calcext:value-type="float">
            <text:p>384</text:p>
          </table:table-cell>
          <table:table-cell office:value-type="string" calcext:value-type="string">
            <text:p>2-78</text:p>
          </table:table-cell>
          <table:table-cell office:value-type="float" office:value="78" calcext:value-type="float">
            <text:p>78</text:p>
          </table:table-cell>
          <table:table-cell office:value-type="string" calcext:value-type="string">
            <text:p>RYマーブルオーブ</text:p>
          </table:table-cell>
          <table:table-cell office:value-type="string" calcext:value-type="string">
            <text:p>ryまーぶるおーぶ</text:p>
          </table:table-cell>
          <table:table-cell office:value-type="string" calcext:value-type="string">
            <text:p>第２弾ブースターパック</text:p>
          </table:table-cell>
          <table:table-cell table:formula="of:=VLOOKUP([.G211];[$収録番号.$A$1:$収録番号.$B$9];2;0)" office:value-type="float" office:value="25" calcext:value-type="float">
            <text:p>25</text:p>
          </table:table-cell>
          <table:table-cell office:value-type="string" calcext:value-type="string">
            <text:p>R</text:p>
          </table:table-cell>
          <table:table-cell table:formula="of:=VLOOKUP([.I211];[$レアリティ番号.$A$1:$レアリティ番号.$B$4];2;0)" office:value-type="float" office:value="2" calcext:value-type="float">
            <text:p>2</text:p>
          </table:table-cell>
          <table:table-cell office:value-type="string" calcext:value-type="string">
            <text:p>マリョク</text:p>
          </table:table-cell>
          <table:table-cell table:formula="of:=VLOOKUP([.K211];[$種類番号.$A$1:$種類番号.$B$4];2;0)" office:value-type="float" office:value="4" calcext:value-type="float">
            <text:p>4</text:p>
          </table:table-cell>
          <table:table-cell office:value-type="string" calcext:value-type="string">
            <text:p>赤黄</text:p>
          </table:table-cell>
          <table:table-cell table:formula="of:=VLOOKUP([.M211];[$色番号.$A$1:$色番号.$B$10];2;0)" office:value-type="float" office:value="41" calcext:value-type="float">
            <text:p>4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1];[$特性番号.$A$1:$特性番号.$B$8];2;0);0)" office:value-type="float" office:value="0" calcext:value-type="float">
            <text:p>0</text:p>
          </table:table-cell>
          <table:table-cell office:value-type="string" calcext:value-type="string">
            <text:p>魔力ゾーンに置かれたとき、赤か黄の他のマリョクが自分の魔力ゾーンにないなら、自分の戦場のガーディアン1体を山札の上に戻す。</text:p>
          </table:table-cell>
          <table:table-cell table:style-name="ce8" office:value-type="string" calcext:value-type="string">
            <text:p>復元</text:p>
          </table:table-cell>
          <table:table-cell table:formula="of:=IFERROR(VLOOKUP([.$V211];[$遺業能力番号.$A$1:$遺業能力番号.$B$9];2;0);0)" office:value-type="float" office:value="3" calcext:value-type="float">
            <text:p>3</text:p>
          </table:table-cell>
          <table:table-cell office:value-type="string" calcext:value-type="string">
            <text:p>https://one-draw.jp/ijinden/cardlist/002/card/02_078.png</text:p>
          </table:table-cell>
          <table:table-cell table:formula="of:=CONCATENATE([$JSON.$A$1];[.$C211];[$JSON.$B$1];[.$E211];[$JSON.$C$1];[.$F211];[$JSON.$D$1];IF(ISNA([.$S211]);&quot;null&quot;;&quot;&quot;&quot;&quot;&amp;[.$S211]&amp;&quot;&quot;&quot;&quot;);[$JSON.$E$1];[.$U211];[$JSON.$F$1];IF(ISNA([.$V211]);&quot;null&quot;;&quot;&quot;&quot;&quot;&amp;[.$V211]&amp;&quot;&quot;&quot;&quot;);[$JSON.$G$1];[.$X211];[$JSON.$H$1];[.$H211];[$JSON.$I$1];[.J211];[$JSON.$J$1];[.$L211];[$JSON.$K$1];[.$O211];[$JSON.$L$1];[.$N211];[$JSON.$M$1];[.$R211];[$JSON.$N$1];[.$T211];[$JSON.$O$1];[.$W211];[$JSON.$P$1];[.$A211];[$JSON.$Q$1];[.$B211];[$JSON.$R$1])" office:value-type="string" office:string-value="{&quot;id&quot;:&quot;2-78&quot;,&quot;name&quot;:&quot;RYマーブルオーブ&quot;,&quot;kana&quot;:&quot;ryまーぶるおーぶ&quot;,&quot;traitText&quot;:null,&quot;ruleText&quot;:&quot;魔力ゾーンに置かれたとき、赤か黄の他のマリョクが自分の魔力ゾーンにないなら、自分の戦場のガーディアン1体を山札の上に戻す。&quot;,&quot;legacyText&quot;:&quot;復元&quot;,&quot;imageUrl&quot;:&quot;https://one-draw.jp/ijinden/cardlist/002/card/02_078.png&quot;,&quot;expansion&quot;:25,&quot;rarity&quot;:2,&quot;type&quot;:4,&quot;level&quot;:2,&quot;color&quot;:41,&quot;term&quot;:0,&quot;trait&quot;:0,&quot;legacy&quot;:3,&quot;orderTable&quot;:210,&quot;orderDeck&quot;:384}," calcext:value-type="string">
            <text:p>{"id":"2-78","name":"RYマーブルオーブ","kana":"ryまーぶるおーぶ","traitText":null,"ruleText":"魔力ゾーンに置かれたとき、赤か黄の他のマリョクが自分の魔力ゾーンにないなら、自分の戦場のガーディアン1体を山札の上に戻す。","legacyText":"復元","imageUrl":"https://one-draw.jp/ijinden/cardlist/002/card/02_078.png","expansion":25,"rarity":2,"type":4,"level":2,"color":41,"term":0,"trait":0,"legacy":3,"orderTable":210,"orderDeck":384},</text:p>
          </table:table-cell>
          <table:table-cell table:number-columns-repeated="16347"/>
        </table:table-row>
        <table:table-row table:style-name="ro2">
          <table:table-cell office:value-type="float" office:value="211" calcext:value-type="float">
            <text:p>211</text:p>
          </table:table-cell>
          <table:table-cell office:value-type="float" office:value="385" calcext:value-type="float">
            <text:p>385</text:p>
          </table:table-cell>
          <table:table-cell office:value-type="string" calcext:value-type="string">
            <text:p>2-79</text:p>
          </table:table-cell>
          <table:table-cell office:value-type="float" office:value="79" calcext:value-type="float">
            <text:p>79</text:p>
          </table:table-cell>
          <table:table-cell office:value-type="string" calcext:value-type="string">
            <text:p>BYマーブルオーブ</text:p>
          </table:table-cell>
          <table:table-cell office:value-type="string" calcext:value-type="string">
            <text:p>byまーぶるおーぶ</text:p>
          </table:table-cell>
          <table:table-cell office:value-type="string" calcext:value-type="string">
            <text:p>第２弾ブースターパック</text:p>
          </table:table-cell>
          <table:table-cell table:formula="of:=VLOOKUP([.G212];[$収録番号.$A$1:$収録番号.$B$9];2;0)" office:value-type="float" office:value="25" calcext:value-type="float">
            <text:p>25</text:p>
          </table:table-cell>
          <table:table-cell office:value-type="string" calcext:value-type="string">
            <text:p>R</text:p>
          </table:table-cell>
          <table:table-cell table:formula="of:=VLOOKUP([.I212];[$レアリティ番号.$A$1:$レアリティ番号.$B$4];2;0)" office:value-type="float" office:value="2" calcext:value-type="float">
            <text:p>2</text:p>
          </table:table-cell>
          <table:table-cell office:value-type="string" calcext:value-type="string">
            <text:p>マリョク</text:p>
          </table:table-cell>
          <table:table-cell table:formula="of:=VLOOKUP([.K212];[$種類番号.$A$1:$種類番号.$B$4];2;0)" office:value-type="float" office:value="4" calcext:value-type="float">
            <text:p>4</text:p>
          </table:table-cell>
          <table:table-cell office:value-type="string" calcext:value-type="string">
            <text:p>青黄</text:p>
          </table:table-cell>
          <table:table-cell table:formula="of:=VLOOKUP([.M212];[$色番号.$A$1:$色番号.$B$10];2;0)" office:value-type="float" office:value="42" calcext:value-type="float">
            <text:p>4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2];[$特性番号.$A$1:$特性番号.$B$8];2;0);0)" office:value-type="float" office:value="0" calcext:value-type="float">
            <text:p>0</text:p>
          </table:table-cell>
          <table:table-cell office:value-type="string" calcext:value-type="string">
            <text:p>魔力ゾーンに置かれたとき、青か黄の他のマリョクが自分の魔力ゾーンにないなら、自分の戦場のガーディアン1体を山札の上に戻す。</text:p>
          </table:table-cell>
          <table:table-cell table:style-name="ce8" office:value-type="string" calcext:value-type="string">
            <text:p>復元</text:p>
          </table:table-cell>
          <table:table-cell table:formula="of:=IFERROR(VLOOKUP([.$V212];[$遺業能力番号.$A$1:$遺業能力番号.$B$9];2;0);0)" office:value-type="float" office:value="3" calcext:value-type="float">
            <text:p>3</text:p>
          </table:table-cell>
          <table:table-cell office:value-type="string" calcext:value-type="string">
            <text:p>https://one-draw.jp/ijinden/cardlist/002/card/02_079.png</text:p>
          </table:table-cell>
          <table:table-cell table:formula="of:=CONCATENATE([$JSON.$A$1];[.$C212];[$JSON.$B$1];[.$E212];[$JSON.$C$1];[.$F212];[$JSON.$D$1];IF(ISNA([.$S212]);&quot;null&quot;;&quot;&quot;&quot;&quot;&amp;[.$S212]&amp;&quot;&quot;&quot;&quot;);[$JSON.$E$1];[.$U212];[$JSON.$F$1];IF(ISNA([.$V212]);&quot;null&quot;;&quot;&quot;&quot;&quot;&amp;[.$V212]&amp;&quot;&quot;&quot;&quot;);[$JSON.$G$1];[.$X212];[$JSON.$H$1];[.$H212];[$JSON.$I$1];[.J212];[$JSON.$J$1];[.$L212];[$JSON.$K$1];[.$O212];[$JSON.$L$1];[.$N212];[$JSON.$M$1];[.$R212];[$JSON.$N$1];[.$T212];[$JSON.$O$1];[.$W212];[$JSON.$P$1];[.$A212];[$JSON.$Q$1];[.$B212];[$JSON.$R$1])" office:value-type="string" office:string-value="{&quot;id&quot;:&quot;2-79&quot;,&quot;name&quot;:&quot;BYマーブルオーブ&quot;,&quot;kana&quot;:&quot;byまーぶるおーぶ&quot;,&quot;traitText&quot;:null,&quot;ruleText&quot;:&quot;魔力ゾーンに置かれたとき、青か黄の他のマリョクが自分の魔力ゾーンにないなら、自分の戦場のガーディアン1体を山札の上に戻す。&quot;,&quot;legacyText&quot;:&quot;復元&quot;,&quot;imageUrl&quot;:&quot;https://one-draw.jp/ijinden/cardlist/002/card/02_079.png&quot;,&quot;expansion&quot;:25,&quot;rarity&quot;:2,&quot;type&quot;:4,&quot;level&quot;:2,&quot;color&quot;:42,&quot;term&quot;:0,&quot;trait&quot;:0,&quot;legacy&quot;:3,&quot;orderTable&quot;:211,&quot;orderDeck&quot;:385}," calcext:value-type="string">
            <text:p>{"id":"2-79","name":"BYマーブルオーブ","kana":"byまーぶるおーぶ","traitText":null,"ruleText":"魔力ゾーンに置かれたとき、青か黄の他のマリョクが自分の魔力ゾーンにないなら、自分の戦場のガーディアン1体を山札の上に戻す。","legacyText":"復元","imageUrl":"https://one-draw.jp/ijinden/cardlist/002/card/02_079.png","expansion":25,"rarity":2,"type":4,"level":2,"color":42,"term":0,"trait":0,"legacy":3,"orderTable":211,"orderDeck":385},</text:p>
          </table:table-cell>
          <table:table-cell table:number-columns-repeated="16347"/>
        </table:table-row>
        <table:table-row table:style-name="ro2">
          <table:table-cell office:value-type="float" office:value="212" calcext:value-type="float">
            <text:p>212</text:p>
          </table:table-cell>
          <table:table-cell office:value-type="float" office:value="386" calcext:value-type="float">
            <text:p>386</text:p>
          </table:table-cell>
          <table:table-cell office:value-type="string" calcext:value-type="string">
            <text:p>2-80</text:p>
          </table:table-cell>
          <table:table-cell office:value-type="float" office:value="80" calcext:value-type="float">
            <text:p>80</text:p>
          </table:table-cell>
          <table:table-cell office:value-type="string" calcext:value-type="string">
            <text:p>GYマーブルオーブ</text:p>
          </table:table-cell>
          <table:table-cell office:value-type="string" calcext:value-type="string">
            <text:p>gyまーぶるおーぶ</text:p>
          </table:table-cell>
          <table:table-cell office:value-type="string" calcext:value-type="string">
            <text:p>第２弾ブースターパック</text:p>
          </table:table-cell>
          <table:table-cell table:formula="of:=VLOOKUP([.G213];[$収録番号.$A$1:$収録番号.$B$9];2;0)" office:value-type="float" office:value="25" calcext:value-type="float">
            <text:p>25</text:p>
          </table:table-cell>
          <table:table-cell office:value-type="string" calcext:value-type="string">
            <text:p>R</text:p>
          </table:table-cell>
          <table:table-cell table:formula="of:=VLOOKUP([.I213];[$レアリティ番号.$A$1:$レアリティ番号.$B$4];2;0)" office:value-type="float" office:value="2" calcext:value-type="float">
            <text:p>2</text:p>
          </table:table-cell>
          <table:table-cell office:value-type="string" calcext:value-type="string">
            <text:p>マリョク</text:p>
          </table:table-cell>
          <table:table-cell table:formula="of:=VLOOKUP([.K213];[$種類番号.$A$1:$種類番号.$B$4];2;0)" office:value-type="float" office:value="4" calcext:value-type="float">
            <text:p>4</text:p>
          </table:table-cell>
          <table:table-cell office:value-type="string" calcext:value-type="string">
            <text:p>緑黄</text:p>
          </table:table-cell>
          <table:table-cell table:formula="of:=VLOOKUP([.M213];[$色番号.$A$1:$色番号.$B$10];2;0)" office:value-type="float" office:value="44" calcext:value-type="float">
            <text:p>4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3];[$特性番号.$A$1:$特性番号.$B$8];2;0);0)" office:value-type="float" office:value="0" calcext:value-type="float">
            <text:p>0</text:p>
          </table:table-cell>
          <table:table-cell office:value-type="string" calcext:value-type="string">
            <text:p>魔力ゾーンに置かれたとき、緑か黄の他のマリョクが自分の魔力ゾーンにないなら、自分の戦場のガーディアン1体を山札の上に戻す。</text:p>
          </table:table-cell>
          <table:table-cell table:style-name="ce8" office:value-type="string" calcext:value-type="string">
            <text:p>復元</text:p>
          </table:table-cell>
          <table:table-cell table:formula="of:=IFERROR(VLOOKUP([.$V213];[$遺業能力番号.$A$1:$遺業能力番号.$B$9];2;0);0)" office:value-type="float" office:value="3" calcext:value-type="float">
            <text:p>3</text:p>
          </table:table-cell>
          <table:table-cell office:value-type="string" calcext:value-type="string">
            <text:p>https://one-draw.jp/ijinden/cardlist/002/card/02_080.png</text:p>
          </table:table-cell>
          <table:table-cell table:formula="of:=CONCATENATE([$JSON.$A$1];[.$C213];[$JSON.$B$1];[.$E213];[$JSON.$C$1];[.$F213];[$JSON.$D$1];IF(ISNA([.$S213]);&quot;null&quot;;&quot;&quot;&quot;&quot;&amp;[.$S213]&amp;&quot;&quot;&quot;&quot;);[$JSON.$E$1];[.$U213];[$JSON.$F$1];IF(ISNA([.$V213]);&quot;null&quot;;&quot;&quot;&quot;&quot;&amp;[.$V213]&amp;&quot;&quot;&quot;&quot;);[$JSON.$G$1];[.$X213];[$JSON.$H$1];[.$H213];[$JSON.$I$1];[.J213];[$JSON.$J$1];[.$L213];[$JSON.$K$1];[.$O213];[$JSON.$L$1];[.$N213];[$JSON.$M$1];[.$R213];[$JSON.$N$1];[.$T213];[$JSON.$O$1];[.$W213];[$JSON.$P$1];[.$A213];[$JSON.$Q$1];[.$B213];[$JSON.$R$1])" office:value-type="string" office:string-value="{&quot;id&quot;:&quot;2-80&quot;,&quot;name&quot;:&quot;GYマーブルオーブ&quot;,&quot;kana&quot;:&quot;gyまーぶるおーぶ&quot;,&quot;traitText&quot;:null,&quot;ruleText&quot;:&quot;魔力ゾーンに置かれたとき、緑か黄の他のマリョクが自分の魔力ゾーンにないなら、自分の戦場のガーディアン1体を山札の上に戻す。&quot;,&quot;legacyText&quot;:&quot;復元&quot;,&quot;imageUrl&quot;:&quot;https://one-draw.jp/ijinden/cardlist/002/card/02_080.png&quot;,&quot;expansion&quot;:25,&quot;rarity&quot;:2,&quot;type&quot;:4,&quot;level&quot;:2,&quot;color&quot;:44,&quot;term&quot;:0,&quot;trait&quot;:0,&quot;legacy&quot;:3,&quot;orderTable&quot;:212,&quot;orderDeck&quot;:386}," calcext:value-type="string">
            <text:p>{"id":"2-80","name":"GYマーブルオーブ","kana":"gyまーぶるおーぶ","traitText":null,"ruleText":"魔力ゾーンに置かれたとき、緑か黄の他のマリョクが自分の魔力ゾーンにないなら、自分の戦場のガーディアン1体を山札の上に戻す。","legacyText":"復元","imageUrl":"https://one-draw.jp/ijinden/cardlist/002/card/02_080.png","expansion":25,"rarity":2,"type":4,"level":2,"color":44,"term":0,"trait":0,"legacy":3,"orderTable":212,"orderDeck":386},</text:p>
          </table:table-cell>
          <table:table-cell table:number-columns-repeated="16347"/>
        </table:table-row>
        <table:table-row table:style-name="ro2">
          <table:table-cell office:value-type="float" office:value="213" calcext:value-type="float">
            <text:p>213</text:p>
          </table:table-cell>
          <table:table-cell office:value-type="float" office:value="139" calcext:value-type="float">
            <text:p>139</text:p>
          </table:table-cell>
          <table:table-cell office:value-type="string" calcext:value-type="string">
            <text:p>P-1</text:p>
          </table:table-cell>
          <table:table-cell office:value-type="float" office:value="1" calcext:value-type="float">
            <text:p>1</text:p>
          </table:table-cell>
          <table:table-cell office:value-type="string" calcext:value-type="string">
            <text:p>マリ・キュリー</text:p>
          </table:table-cell>
          <table:table-cell office:value-type="string" calcext:value-type="string">
            <text:p>まりきゅりー</text:p>
          </table:table-cell>
          <table:table-cell office:value-type="string" calcext:value-type="string">
            <text:p>発展する医療デッキ</text:p>
          </table:table-cell>
          <table:table-cell table:formula="of:=VLOOKUP([.G214];[$収録番号.$A$1:$収録番号.$B$9];2;0)" office:value-type="float" office:value="30" calcext:value-type="float">
            <text:p>30</text:p>
          </table:table-cell>
          <table:table-cell office:value-type="string" calcext:value-type="string">
            <text:p>SR</text:p>
          </table:table-cell>
          <table:table-cell table:formula="of:=VLOOKUP([.I214];[$レアリティ番号.$A$1:$レアリティ番号.$B$4];2;0)" office:value-type="float" office:value="4" calcext:value-type="float">
            <text:p>4</text:p>
          </table:table-cell>
          <table:table-cell office:value-type="string" calcext:value-type="string">
            <text:p>イジン</text:p>
          </table:table-cell>
          <table:table-cell table:formula="of:=VLOOKUP([.K214];[$種類番号.$A$1:$種類番号.$B$4];2;0)" office:value-type="float" office:value="1" calcext:value-type="float">
            <text:p>1</text:p>
          </table:table-cell>
          <table:table-cell office:value-type="string" calcext:value-type="string">
            <text:p>紫</text:p>
          </table:table-cell>
          <table:table-cell table:formula="of:=VLOOKUP([.M214];[$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4];[$特性番号.$A$1:$特性番号.$B$8];2;0);0)" office:value-type="float" office:value="0" calcext:value-type="float">
            <text:p>0</text:p>
          </table:table-cell>
          <table:table-cell office:value-type="string" calcext:value-type="string">
            <text:p>戦場に置かれたとき、相手の手札が自分の手札より多いなら発動する。相手の手札を自分の手札と同じ枚数になるように墓地に置く。墓地に置く手札は相手が選ぶ。</text:p>
          </table:table-cell>
          <table:table-cell office:value-type="string" calcext:value-type="string">
            <text:p>木霊</text:p>
          </table:table-cell>
          <table:table-cell table:formula="of:=IFERROR(VLOOKUP([.$V214];[$遺業能力番号.$A$1:$遺業能力番号.$B$9];2;0);0)" office:value-type="float" office:value="8" calcext:value-type="float">
            <text:p>8</text:p>
          </table:table-cell>
          <table:table-cell office:value-type="string" calcext:value-type="string">
            <text:p>https://one-draw.jp/ijinden/cardlist/P01/card/03_P_001.png</text:p>
          </table:table-cell>
          <table:table-cell table:formula="of:=CONCATENATE([$JSON.$A$1];[.$C214];[$JSON.$B$1];[.$E214];[$JSON.$C$1];[.$F214];[$JSON.$D$1];IF(ISNA([.$S214]);&quot;null&quot;;&quot;&quot;&quot;&quot;&amp;[.$S214]&amp;&quot;&quot;&quot;&quot;);[$JSON.$E$1];[.$U214];[$JSON.$F$1];IF(ISNA([.$V214]);&quot;null&quot;;&quot;&quot;&quot;&quot;&amp;[.$V214]&amp;&quot;&quot;&quot;&quot;);[$JSON.$G$1];[.$X214];[$JSON.$H$1];[.$H214];[$JSON.$I$1];[.J214];[$JSON.$J$1];[.$L214];[$JSON.$K$1];[.$O214];[$JSON.$L$1];[.$N214];[$JSON.$M$1];[.$R214];[$JSON.$N$1];[.$T214];[$JSON.$O$1];[.$W214];[$JSON.$P$1];[.$A214];[$JSON.$Q$1];[.$B214];[$JSON.$R$1])" office:value-type="string" office:string-value="{&quot;id&quot;:&quot;P-1&quot;,&quot;name&quot;:&quot;マリ・キュリー&quot;,&quot;kana&quot;:&quot;まりきゅりー&quot;,&quot;traitText&quot;:null,&quot;ruleText&quot;:&quot;戦場に置かれたとき、相手の手札が自分の手札より多いなら発動する。相手の手札を自分の手札と同じ枚数になるように墓地に置く。墓地に置く手札は相手が選ぶ。&quot;,&quot;legacyText&quot;:&quot;木霊&quot;,&quot;imageUrl&quot;:&quot;https://one-draw.jp/ijinden/cardlist/P01/card/03_P_001.png&quot;,&quot;expansion&quot;:30,&quot;rarity&quot;:4,&quot;type&quot;:1,&quot;level&quot;:4,&quot;color&quot;:16,&quot;term&quot;:0,&quot;trait&quot;:0,&quot;legacy&quot;:8,&quot;orderTable&quot;:213,&quot;orderDeck&quot;:139}," calcext:value-type="string">
            <text:p>{"id":"P-1","name":"マリ・キュリー","kana":"まりきゅりー","traitText":null,"ruleText":"戦場に置かれたとき、相手の手札が自分の手札より多いなら発動する。相手の手札を自分の手札と同じ枚数になるように墓地に置く。墓地に置く手札は相手が選ぶ。","legacyText":"木霊","imageUrl":"https://one-draw.jp/ijinden/cardlist/P01/card/03_P_001.png","expansion":30,"rarity":4,"type":1,"level":4,"color":16,"term":0,"trait":0,"legacy":8,"orderTable":213,"orderDeck":139},</text:p>
          </table:table-cell>
          <table:table-cell table:number-columns-repeated="16347"/>
        </table:table-row>
        <table:table-row table:style-name="ro2">
          <table:table-cell office:value-type="float" office:value="214" calcext:value-type="float">
            <text:p>214</text:p>
          </table:table-cell>
          <table:table-cell office:value-type="float" office:value="20" calcext:value-type="float">
            <text:p>20</text:p>
          </table:table-cell>
          <table:table-cell office:value-type="string" calcext:value-type="string">
            <text:p>P-2</text:p>
          </table:table-cell>
          <table:table-cell office:value-type="float" office:value="2" calcext:value-type="float">
            <text:p>2</text:p>
          </table:table-cell>
          <table:table-cell office:value-type="string" calcext:value-type="string">
            <text:p>篤姫</text:p>
          </table:table-cell>
          <table:table-cell office:value-type="string" calcext:value-type="string">
            <text:p>あつひめ</text:p>
          </table:table-cell>
          <table:table-cell office:value-type="string" calcext:value-type="string">
            <text:p>発展する医療デッキ</text:p>
          </table:table-cell>
          <table:table-cell table:formula="of:=VLOOKUP([.G215];[$収録番号.$A$1:$収録番号.$B$9];2;0)" office:value-type="float" office:value="30" calcext:value-type="float">
            <text:p>30</text:p>
          </table:table-cell>
          <table:table-cell office:value-type="string" calcext:value-type="string">
            <text:p>N</text:p>
          </table:table-cell>
          <table:table-cell table:formula="of:=VLOOKUP([.I215];[$レアリティ番号.$A$1:$レアリティ番号.$B$4];2;0)" office:value-type="float" office:value="1" calcext:value-type="float">
            <text:p>1</text:p>
          </table:table-cell>
          <table:table-cell office:value-type="string" calcext:value-type="string">
            <text:p>イジン</text:p>
          </table:table-cell>
          <table:table-cell table:formula="of:=VLOOKUP([.K215];[$種類番号.$A$1:$種類番号.$B$4];2;0)" office:value-type="float" office:value="1" calcext:value-type="float">
            <text:p>1</text:p>
          </table:table-cell>
          <table:table-cell office:value-type="string" calcext:value-type="string">
            <text:p>紫</text:p>
          </table:table-cell>
          <table:table-cell table:formula="of:=VLOOKUP([.M215];[$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5];[$特性番号.$A$1:$特性番号.$B$8];2;0);0)" office:value-type="float" office:value="0" calcext:value-type="float">
            <text:p>0</text:p>
          </table:table-cell>
          <table:table-cell office:value-type="string" calcext:value-type="string">
            <text:p>戦場に置かれたとき、戦場の裏のカード1つの表を見る。</text:p>
          </table:table-cell>
          <table:table-cell office:value-type="string" calcext:value-type="string">
            <text:p>魔力化</text:p>
          </table:table-cell>
          <table:table-cell table:formula="of:=IFERROR(VLOOKUP([.$V215];[$遺業能力番号.$A$1:$遺業能力番号.$B$9];2;0);0)" office:value-type="float" office:value="1" calcext:value-type="float">
            <text:p>1</text:p>
          </table:table-cell>
          <table:table-cell office:value-type="string" calcext:value-type="string">
            <text:p>https://one-draw.jp/ijinden/cardlist/P01/card/03_P_002.png</text:p>
          </table:table-cell>
          <table:table-cell table:formula="of:=CONCATENATE([$JSON.$A$1];[.$C215];[$JSON.$B$1];[.$E215];[$JSON.$C$1];[.$F215];[$JSON.$D$1];IF(ISNA([.$S215]);&quot;null&quot;;&quot;&quot;&quot;&quot;&amp;[.$S215]&amp;&quot;&quot;&quot;&quot;);[$JSON.$E$1];[.$U215];[$JSON.$F$1];IF(ISNA([.$V215]);&quot;null&quot;;&quot;&quot;&quot;&quot;&amp;[.$V215]&amp;&quot;&quot;&quot;&quot;);[$JSON.$G$1];[.$X215];[$JSON.$H$1];[.$H215];[$JSON.$I$1];[.J215];[$JSON.$J$1];[.$L215];[$JSON.$K$1];[.$O215];[$JSON.$L$1];[.$N215];[$JSON.$M$1];[.$R215];[$JSON.$N$1];[.$T215];[$JSON.$O$1];[.$W215];[$JSON.$P$1];[.$A215];[$JSON.$Q$1];[.$B215];[$JSON.$R$1])" office:value-type="string" office:string-value="{&quot;id&quot;:&quot;P-2&quot;,&quot;name&quot;:&quot;篤姫&quot;,&quot;kana&quot;:&quot;あつひめ&quot;,&quot;traitText&quot;:null,&quot;ruleText&quot;:&quot;戦場に置かれたとき、戦場の裏のカード1つの表を見る。&quot;,&quot;legacyText&quot;:&quot;魔力化&quot;,&quot;imageUrl&quot;:&quot;https://one-draw.jp/ijinden/cardlist/P01/card/03_P_002.png&quot;,&quot;expansion&quot;:30,&quot;rarity&quot;:1,&quot;type&quot;:1,&quot;level&quot;:1,&quot;color&quot;:16,&quot;term&quot;:0,&quot;trait&quot;:0,&quot;legacy&quot;:1,&quot;orderTable&quot;:214,&quot;orderDeck&quot;:20}," calcext:value-type="string">
            <text:p>{"id":"P-2","name":"篤姫","kana":"あつひめ","traitText":null,"ruleText":"戦場に置かれたとき、戦場の裏のカード1つの表を見る。","legacyText":"魔力化","imageUrl":"https://one-draw.jp/ijinden/cardlist/P01/card/03_P_002.png","expansion":30,"rarity":1,"type":1,"level":1,"color":16,"term":0,"trait":0,"legacy":1,"orderTable":214,"orderDeck":20},</text:p>
          </table:table-cell>
          <table:table-cell table:number-columns-repeated="16347"/>
        </table:table-row>
        <table:table-row table:style-name="ro2">
          <table:table-cell office:value-type="float" office:value="215" calcext:value-type="float">
            <text:p>215</text:p>
          </table:table-cell>
          <table:table-cell office:value-type="float" office:value="58" calcext:value-type="float">
            <text:p>58</text:p>
          </table:table-cell>
          <table:table-cell office:value-type="string" calcext:value-type="string">
            <text:p>P-3</text:p>
          </table:table-cell>
          <table:table-cell office:value-type="float" office:value="3" calcext:value-type="float">
            <text:p>3</text:p>
          </table:table-cell>
          <table:table-cell office:value-type="string" calcext:value-type="string">
            <text:p>李成桂</text:p>
          </table:table-cell>
          <table:table-cell office:value-type="string" calcext:value-type="string">
            <text:p>りせいけい</text:p>
          </table:table-cell>
          <table:table-cell office:value-type="string" calcext:value-type="string">
            <text:p>発展する医療デッキ</text:p>
          </table:table-cell>
          <table:table-cell table:formula="of:=VLOOKUP([.G216];[$収録番号.$A$1:$収録番号.$B$9];2;0)" office:value-type="float" office:value="30" calcext:value-type="float">
            <text:p>30</text:p>
          </table:table-cell>
          <table:table-cell office:value-type="string" calcext:value-type="string">
            <text:p>N</text:p>
          </table:table-cell>
          <table:table-cell table:formula="of:=VLOOKUP([.I216];[$レアリティ番号.$A$1:$レアリティ番号.$B$4];2;0)" office:value-type="float" office:value="1" calcext:value-type="float">
            <text:p>1</text:p>
          </table:table-cell>
          <table:table-cell office:value-type="string" calcext:value-type="string">
            <text:p>イジン</text:p>
          </table:table-cell>
          <table:table-cell table:formula="of:=VLOOKUP([.K216];[$種類番号.$A$1:$種類番号.$B$4];2;0)" office:value-type="float" office:value="1" calcext:value-type="float">
            <text:p>1</text:p>
          </table:table-cell>
          <table:table-cell office:value-type="string" calcext:value-type="string">
            <text:p>紫</text:p>
          </table:table-cell>
          <table:table-cell table:formula="of:=VLOOKUP([.M216];[$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6];[$特性番号.$A$1:$特性番号.$B$8];2;0);0)" office:value-type="float" office:value="0" calcext:value-type="float">
            <text:p>0</text:p>
          </table:table-cell>
          <table:table-cell office:value-type="string" calcext:value-type="string">
            <text:p>スタンド¶戦場に置かれたとき、自分の戦場のガーディアン1体か、自分の墓地のカード1つを指定して発動できる。そのカードを山札の上に戻す。</text:p>
          </table:table-cell>
          <table:table-cell office:value-type="string" calcext:value-type="string">
            <text:p>1ドローする</text:p>
          </table:table-cell>
          <table:table-cell table:formula="of:=IFERROR(VLOOKUP([.$V216];[$遺業能力番号.$A$1:$遺業能力番号.$B$9];2;0);0)" office:value-type="float" office:value="4" calcext:value-type="float">
            <text:p>4</text:p>
          </table:table-cell>
          <table:table-cell office:value-type="string" calcext:value-type="string">
            <text:p>https://one-draw.jp/ijinden/cardlist/P01/card/03_P_003.png</text:p>
          </table:table-cell>
          <table:table-cell table:formula="of:=CONCATENATE([$JSON.$A$1];[.$C216];[$JSON.$B$1];[.$E216];[$JSON.$C$1];[.$F216];[$JSON.$D$1];IF(ISNA([.$S216]);&quot;null&quot;;&quot;&quot;&quot;&quot;&amp;[.$S216]&amp;&quot;&quot;&quot;&quot;);[$JSON.$E$1];[.$U216];[$JSON.$F$1];IF(ISNA([.$V216]);&quot;null&quot;;&quot;&quot;&quot;&quot;&amp;[.$V216]&amp;&quot;&quot;&quot;&quot;);[$JSON.$G$1];[.$X216];[$JSON.$H$1];[.$H216];[$JSON.$I$1];[.J216];[$JSON.$J$1];[.$L216];[$JSON.$K$1];[.$O216];[$JSON.$L$1];[.$N216];[$JSON.$M$1];[.$R216];[$JSON.$N$1];[.$T216];[$JSON.$O$1];[.$W216];[$JSON.$P$1];[.$A216];[$JSON.$Q$1];[.$B216];[$JSON.$R$1])" office:value-type="string" office:string-value="{&quot;id&quot;:&quot;P-3&quot;,&quot;name&quot;:&quot;李成桂&quot;,&quot;kana&quot;:&quot;りせいけい&quot;,&quot;traitText&quot;:null,&quot;ruleText&quot;:&quot;スタンド¶戦場に置かれたとき、自分の戦場のガーディアン1体か、自分の墓地のカード1つを指定して発動できる。そのカードを山札の上に戻す。&quot;,&quot;legacyText&quot;:&quot;1ドローする&quot;,&quot;imageUrl&quot;:&quot;https://one-draw.jp/ijinden/cardlist/P01/card/03_P_003.png&quot;,&quot;expansion&quot;:30,&quot;rarity&quot;:1,&quot;type&quot;:1,&quot;level&quot;:2,&quot;color&quot;:16,&quot;term&quot;:0,&quot;trait&quot;:0,&quot;legacy&quot;:4,&quot;orderTable&quot;:215,&quot;orderDeck&quot;:58}," calcext:value-type="string">
            <text:p>{"id":"P-3","name":"李成桂","kana":"りせいけい","traitText":null,"ruleText":"スタンド¶戦場に置かれたとき、自分の戦場のガーディアン1体か、自分の墓地のカード1つを指定して発動できる。そのカードを山札の上に戻す。","legacyText":"1ドローする","imageUrl":"https://one-draw.jp/ijinden/cardlist/P01/card/03_P_003.png","expansion":30,"rarity":1,"type":1,"level":2,"color":16,"term":0,"trait":0,"legacy":4,"orderTable":215,"orderDeck":58},</text:p>
          </table:table-cell>
          <table:table-cell table:number-columns-repeated="16347"/>
        </table:table-row>
        <table:table-row table:style-name="ro2">
          <table:table-cell office:value-type="float" office:value="216" calcext:value-type="float">
            <text:p>216</text:p>
          </table:table-cell>
          <table:table-cell office:value-type="float" office:value="140" calcext:value-type="float">
            <text:p>140</text:p>
          </table:table-cell>
          <table:table-cell office:value-type="string" calcext:value-type="string">
            <text:p>P-4</text:p>
          </table:table-cell>
          <table:table-cell office:value-type="float" office:value="4" calcext:value-type="float">
            <text:p>4</text:p>
          </table:table-cell>
          <table:table-cell office:value-type="string" calcext:value-type="string">
            <text:p>杉田玄白</text:p>
          </table:table-cell>
          <table:table-cell office:value-type="string" calcext:value-type="string">
            <text:p>すぎたげんぱく</text:p>
          </table:table-cell>
          <table:table-cell office:value-type="string" calcext:value-type="string">
            <text:p>発展する医療デッキ</text:p>
          </table:table-cell>
          <table:table-cell table:formula="of:=VLOOKUP([.G217];[$収録番号.$A$1:$収録番号.$B$9];2;0)" office:value-type="float" office:value="30" calcext:value-type="float">
            <text:p>30</text:p>
          </table:table-cell>
          <table:table-cell office:value-type="string" calcext:value-type="string">
            <text:p>N</text:p>
          </table:table-cell>
          <table:table-cell table:formula="of:=VLOOKUP([.I217];[$レアリティ番号.$A$1:$レアリティ番号.$B$4];2;0)" office:value-type="float" office:value="1" calcext:value-type="float">
            <text:p>1</text:p>
          </table:table-cell>
          <table:table-cell office:value-type="string" calcext:value-type="string">
            <text:p>イジン</text:p>
          </table:table-cell>
          <table:table-cell table:formula="of:=VLOOKUP([.K217];[$種類番号.$A$1:$種類番号.$B$4];2;0)" office:value-type="float" office:value="1" calcext:value-type="float">
            <text:p>1</text:p>
          </table:table-cell>
          <table:table-cell office:value-type="string" calcext:value-type="string">
            <text:p>紫</text:p>
          </table:table-cell>
          <table:table-cell table:formula="of:=VLOOKUP([.M217];[$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7];[$能力語番号.$A$1:$能力語番号.$B$10];2;0);0)" office:value-type="float" office:value="0" calcext:value-type="float">
            <text:p>0</text:p>
          </table:table-cell>
          <table:table-cell office:value-type="string" calcext:value-type="string">
            <text:p>医術</text:p>
          </table:table-cell>
          <table:table-cell table:formula="of:=IFERROR(VLOOKUP([.$S217];[$特性番号.$A$1:$特性番号.$B$8];2;0);0)" office:value-type="float" office:value="16" calcext:value-type="float">
            <text:p>16</text:p>
          </table:table-cell>
          <table:table-cell office:value-type="string" calcext:value-type="string">
            <text:p>能力によって手札から墓地にイジンでないカードが置かれるたび、そのカードのプレイヤーの山札の上から1枚を墓地に置く。</text:p>
          </table:table-cell>
          <table:table-cell table:formula="of:=NA()" office:value-type="string" office:string-value="" calcext:value-type="error">
            <text:p>#N/A</text:p>
          </table:table-cell>
          <table:table-cell table:formula="of:=IFERROR(VLOOKUP([.$V217];[$遺業能力番号.$A$1:$遺業能力番号.$B$9];2;0);0)" office:value-type="float" office:value="0" calcext:value-type="float">
            <text:p>0</text:p>
          </table:table-cell>
          <table:table-cell office:value-type="string" calcext:value-type="string">
            <text:p>https://one-draw.jp/ijinden/cardlist/P01/card/03_P_004.png</text:p>
          </table:table-cell>
          <table:table-cell table:formula="of:=CONCATENATE([$JSON.$A$1];[.$C217];[$JSON.$B$1];[.$E217];[$JSON.$C$1];[.$F217];[$JSON.$D$1];IF(ISNA([.$S217]);&quot;null&quot;;&quot;&quot;&quot;&quot;&amp;[.$S217]&amp;&quot;&quot;&quot;&quot;);[$JSON.$E$1];[.$U217];[$JSON.$F$1];IF(ISNA([.$V217]);&quot;null&quot;;&quot;&quot;&quot;&quot;&amp;[.$V217]&amp;&quot;&quot;&quot;&quot;);[$JSON.$G$1];[.$X217];[$JSON.$H$1];[.$H217];[$JSON.$I$1];[.J217];[$JSON.$J$1];[.$L217];[$JSON.$K$1];[.$O217];[$JSON.$L$1];[.$N217];[$JSON.$M$1];[.$R217];[$JSON.$N$1];[.$T217];[$JSON.$O$1];[.$W217];[$JSON.$P$1];[.$A217];[$JSON.$Q$1];[.$B217];[$JSON.$R$1])" office:value-type="string" office:string-value="{&quot;id&quot;:&quot;P-4&quot;,&quot;name&quot;:&quot;杉田玄白&quot;,&quot;kana&quot;:&quot;すぎたげんぱく&quot;,&quot;traitText&quot;:&quot;医術&quot;,&quot;ruleText&quot;:&quot;能力によって手札から墓地にイジンでないカードが置かれるたび、そのカードのプレイヤーの山札の上から1枚を墓地に置く。&quot;,&quot;legacyText&quot;:null,&quot;imageUrl&quot;:&quot;https://one-draw.jp/ijinden/cardlist/P01/card/03_P_004.png&quot;,&quot;expansion&quot;:30,&quot;rarity&quot;:1,&quot;type&quot;:1,&quot;level&quot;:4,&quot;color&quot;:16,&quot;term&quot;:0,&quot;trait&quot;:16,&quot;legacy&quot;:0,&quot;orderTable&quot;:216,&quot;orderDeck&quot;:140}," calcext:value-type="string">
            <text:p>{"id":"P-4","name":"杉田玄白","kana":"すぎたげんぱく","traitText":"医術","ruleText":"能力によって手札から墓地にイジンでないカードが置かれるたび、そのカードのプレイヤーの山札の上から1枚を墓地に置く。","legacyText":null,"imageUrl":"https://one-draw.jp/ijinden/cardlist/P01/card/03_P_004.png","expansion":30,"rarity":1,"type":1,"level":4,"color":16,"term":0,"trait":16,"legacy":0,"orderTable":216,"orderDeck":140},</text:p>
          </table:table-cell>
          <table:table-cell table:number-columns-repeated="16347"/>
        </table:table-row>
        <table:table-row table:style-name="ro2">
          <table:table-cell office:value-type="float" office:value="217" calcext:value-type="float">
            <text:p>217</text:p>
          </table:table-cell>
          <table:table-cell office:value-type="float" office:value="59" calcext:value-type="float">
            <text:p>59</text:p>
          </table:table-cell>
          <table:table-cell office:value-type="string" calcext:value-type="string">
            <text:p>P-5</text:p>
          </table:table-cell>
          <table:table-cell office:value-type="float" office:value="5" calcext:value-type="float">
            <text:p>5</text:p>
          </table:table-cell>
          <table:table-cell office:value-type="string" calcext:value-type="string">
            <text:p>渡辺崋山</text:p>
          </table:table-cell>
          <table:table-cell office:value-type="string" calcext:value-type="string">
            <text:p>わたなべかざん</text:p>
          </table:table-cell>
          <table:table-cell office:value-type="string" calcext:value-type="string">
            <text:p>発展する医療デッキ</text:p>
          </table:table-cell>
          <table:table-cell table:formula="of:=VLOOKUP([.G218];[$収録番号.$A$1:$収録番号.$B$9];2;0)" office:value-type="float" office:value="30" calcext:value-type="float">
            <text:p>30</text:p>
          </table:table-cell>
          <table:table-cell office:value-type="string" calcext:value-type="string">
            <text:p>N</text:p>
          </table:table-cell>
          <table:table-cell table:formula="of:=VLOOKUP([.I218];[$レアリティ番号.$A$1:$レアリティ番号.$B$4];2;0)" office:value-type="float" office:value="1" calcext:value-type="float">
            <text:p>1</text:p>
          </table:table-cell>
          <table:table-cell office:value-type="string" calcext:value-type="string">
            <text:p>イジン</text:p>
          </table:table-cell>
          <table:table-cell table:formula="of:=VLOOKUP([.K218];[$種類番号.$A$1:$種類番号.$B$4];2;0)" office:value-type="float" office:value="1" calcext:value-type="float">
            <text:p>1</text:p>
          </table:table-cell>
          <table:table-cell office:value-type="string" calcext:value-type="string">
            <text:p>紫</text:p>
          </table:table-cell>
          <table:table-cell table:formula="of:=VLOOKUP([.M218];[$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8];[$能力語番号.$A$1:$能力語番号.$B$10];2;0);0)" office:value-type="float" office:value="0" calcext:value-type="float">
            <text:p>0</text:p>
          </table:table-cell>
          <table:table-cell office:value-type="string" calcext:value-type="string">
            <text:p>美術</text:p>
          </table:table-cell>
          <table:table-cell table:formula="of:=IFERROR(VLOOKUP([.$S218];[$特性番号.$A$1:$特性番号.$B$8];2;0);0)" office:value-type="float" office:value="2" calcext:value-type="float">
            <text:p>2</text:p>
          </table:table-cell>
          <table:table-cell office:value-type="string" calcext:value-type="string">
            <text:p>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text:p>
          </table:table-cell>
          <table:table-cell table:formula="of:=NA()" office:value-type="string" office:string-value="" calcext:value-type="error">
            <text:p>#N/A</text:p>
          </table:table-cell>
          <table:table-cell table:formula="of:=IFERROR(VLOOKUP([.$V218];[$遺業能力番号.$A$1:$遺業能力番号.$B$9];2;0);0)" office:value-type="float" office:value="0" calcext:value-type="float">
            <text:p>0</text:p>
          </table:table-cell>
          <table:table-cell office:value-type="string" calcext:value-type="string">
            <text:p>https://one-draw.jp/ijinden/cardlist/P01/card/03_P_005.png</text:p>
          </table:table-cell>
          <table:table-cell table:formula="of:=CONCATENATE([$JSON.$A$1];[.$C218];[$JSON.$B$1];[.$E218];[$JSON.$C$1];[.$F218];[$JSON.$D$1];IF(ISNA([.$S218]);&quot;null&quot;;&quot;&quot;&quot;&quot;&amp;[.$S218]&amp;&quot;&quot;&quot;&quot;);[$JSON.$E$1];[.$U218];[$JSON.$F$1];IF(ISNA([.$V218]);&quot;null&quot;;&quot;&quot;&quot;&quot;&amp;[.$V218]&amp;&quot;&quot;&quot;&quot;);[$JSON.$G$1];[.$X218];[$JSON.$H$1];[.$H218];[$JSON.$I$1];[.J218];[$JSON.$J$1];[.$L218];[$JSON.$K$1];[.$O218];[$JSON.$L$1];[.$N218];[$JSON.$M$1];[.$R218];[$JSON.$N$1];[.$T218];[$JSON.$O$1];[.$W218];[$JSON.$P$1];[.$A218];[$JSON.$Q$1];[.$B218];[$JSON.$R$1])" office:value-type="string" office:string-value="{&quot;id&quot;:&quot;P-5&quot;,&quot;name&quot;:&quot;渡辺崋山&quot;,&quot;kana&quot;:&quot;わたなべかざん&quot;,&quot;traitText&quot;:&quot;美術&quot;,&quot;ruleText&quot;:&quot;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quot;,&quot;legacyText&quot;:null,&quot;imageUrl&quot;:&quot;https://one-draw.jp/ijinden/cardlist/P01/card/03_P_005.png&quot;,&quot;expansion&quot;:30,&quot;rarity&quot;:1,&quot;type&quot;:1,&quot;level&quot;:2,&quot;color&quot;:16,&quot;term&quot;:0,&quot;trait&quot;:2,&quot;legacy&quot;:0,&quot;orderTable&quot;:217,&quot;orderDeck&quot;:59}," calcext:value-type="string">
            <text:p>{"id":"P-5","name":"渡辺崋山","kana":"わたなべかざん","traitText":"美術","ruleText":"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legacyText":null,"imageUrl":"https://one-draw.jp/ijinden/cardlist/P01/card/03_P_005.png","expansion":30,"rarity":1,"type":1,"level":2,"color":16,"term":0,"trait":2,"legacy":0,"orderTable":217,"orderDeck":59},</text:p>
          </table:table-cell>
          <table:table-cell table:number-columns-repeated="16347"/>
        </table:table-row>
        <table:table-row table:style-name="ro2">
          <table:table-cell office:value-type="float" office:value="218" calcext:value-type="float">
            <text:p>218</text:p>
          </table:table-cell>
          <table:table-cell office:value-type="float" office:value="101" calcext:value-type="float">
            <text:p>101</text:p>
          </table:table-cell>
          <table:table-cell office:value-type="string" calcext:value-type="string">
            <text:p>P-6</text:p>
          </table:table-cell>
          <table:table-cell office:value-type="float" office:value="6" calcext:value-type="float">
            <text:p>6</text:p>
          </table:table-cell>
          <table:table-cell office:value-type="string" calcext:value-type="string">
            <text:p>緒方洪庵</text:p>
          </table:table-cell>
          <table:table-cell office:value-type="string" calcext:value-type="string">
            <text:p>おがたこうあん</text:p>
          </table:table-cell>
          <table:table-cell office:value-type="string" calcext:value-type="string">
            <text:p>発展する医療デッキ</text:p>
          </table:table-cell>
          <table:table-cell table:formula="of:=VLOOKUP([.G219];[$収録番号.$A$1:$収録番号.$B$9];2;0)" office:value-type="float" office:value="30" calcext:value-type="float">
            <text:p>30</text:p>
          </table:table-cell>
          <table:table-cell office:value-type="string" calcext:value-type="string">
            <text:p>N</text:p>
          </table:table-cell>
          <table:table-cell table:formula="of:=VLOOKUP([.I219];[$レアリティ番号.$A$1:$レアリティ番号.$B$4];2;0)" office:value-type="float" office:value="1" calcext:value-type="float">
            <text:p>1</text:p>
          </table:table-cell>
          <table:table-cell office:value-type="string" calcext:value-type="string">
            <text:p>イジン</text:p>
          </table:table-cell>
          <table:table-cell table:formula="of:=VLOOKUP([.K219];[$種類番号.$A$1:$種類番号.$B$4];2;0)" office:value-type="float" office:value="1" calcext:value-type="float">
            <text:p>1</text:p>
          </table:table-cell>
          <table:table-cell office:value-type="string" calcext:value-type="string">
            <text:p>紫</text:p>
          </table:table-cell>
          <table:table-cell table:formula="of:=VLOOKUP([.M219];[$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9];[$能力語番号.$A$1:$能力語番号.$B$10];2;0);0)" office:value-type="float" office:value="0" calcext:value-type="float">
            <text:p>0</text:p>
          </table:table-cell>
          <table:table-cell office:value-type="string" calcext:value-type="string">
            <text:p>医術</text:p>
          </table:table-cell>
          <table:table-cell table:formula="of:=IFERROR(VLOOKUP([.$S219];[$特性番号.$A$1:$特性番号.$B$8];2;0);0)" office:value-type="float" office:value="16" calcext:value-type="float">
            <text:p>16</text:p>
          </table:table-cell>
          <table:table-cell office:value-type="string" calcext:value-type="string">
            <text:p>能力によって手札から墓地にイジンが置かれるたび、そのカードのプレイヤーは1ドローする。</text:p>
          </table:table-cell>
          <table:table-cell office:value-type="string" calcext:value-type="string">
            <text:p>木霊</text:p>
          </table:table-cell>
          <table:table-cell table:formula="of:=IFERROR(VLOOKUP([.$V219];[$遺業能力番号.$A$1:$遺業能力番号.$B$9];2;0);0)" office:value-type="float" office:value="8" calcext:value-type="float">
            <text:p>8</text:p>
          </table:table-cell>
          <table:table-cell office:value-type="string" calcext:value-type="string">
            <text:p>https://one-draw.jp/ijinden/cardlist/P01/card/03_P_006.png</text:p>
          </table:table-cell>
          <table:table-cell table:formula="of:=CONCATENATE([$JSON.$A$1];[.$C219];[$JSON.$B$1];[.$E219];[$JSON.$C$1];[.$F219];[$JSON.$D$1];IF(ISNA([.$S219]);&quot;null&quot;;&quot;&quot;&quot;&quot;&amp;[.$S219]&amp;&quot;&quot;&quot;&quot;);[$JSON.$E$1];[.$U219];[$JSON.$F$1];IF(ISNA([.$V219]);&quot;null&quot;;&quot;&quot;&quot;&quot;&amp;[.$V219]&amp;&quot;&quot;&quot;&quot;);[$JSON.$G$1];[.$X219];[$JSON.$H$1];[.$H219];[$JSON.$I$1];[.J219];[$JSON.$J$1];[.$L219];[$JSON.$K$1];[.$O219];[$JSON.$L$1];[.$N219];[$JSON.$M$1];[.$R219];[$JSON.$N$1];[.$T219];[$JSON.$O$1];[.$W219];[$JSON.$P$1];[.$A219];[$JSON.$Q$1];[.$B219];[$JSON.$R$1])" office:value-type="string" office:string-value="{&quot;id&quot;:&quot;P-6&quot;,&quot;name&quot;:&quot;緒方洪庵&quot;,&quot;kana&quot;:&quot;おがたこうあん&quot;,&quot;traitText&quot;:&quot;医術&quot;,&quot;ruleText&quot;:&quot;能力によって手札から墓地にイジンが置かれるたび、そのカードのプレイヤーは1ドローする。&quot;,&quot;legacyText&quot;:&quot;木霊&quot;,&quot;imageUrl&quot;:&quot;https://one-draw.jp/ijinden/cardlist/P01/card/03_P_006.png&quot;,&quot;expansion&quot;:30,&quot;rarity&quot;:1,&quot;type&quot;:1,&quot;level&quot;:3,&quot;color&quot;:16,&quot;term&quot;:0,&quot;trait&quot;:16,&quot;legacy&quot;:8,&quot;orderTable&quot;:218,&quot;orderDeck&quot;:101}," calcext:value-type="string">
            <text:p>{"id":"P-6","name":"緒方洪庵","kana":"おがたこうあん","traitText":"医術","ruleText":"能力によって手札から墓地にイジンが置かれるたび、そのカードのプレイヤーは1ドローする。","legacyText":"木霊","imageUrl":"https://one-draw.jp/ijinden/cardlist/P01/card/03_P_006.png","expansion":30,"rarity":1,"type":1,"level":3,"color":16,"term":0,"trait":16,"legacy":8,"orderTable":218,"orderDeck":101},</text:p>
          </table:table-cell>
          <table:table-cell table:number-columns-repeated="16347"/>
        </table:table-row>
        <table:table-row table:style-name="ro2">
          <table:table-cell office:value-type="float" office:value="219" calcext:value-type="float">
            <text:p>219</text:p>
          </table:table-cell>
          <table:table-cell office:value-type="float" office:value="177" calcext:value-type="float">
            <text:p>177</text:p>
          </table:table-cell>
          <table:table-cell office:value-type="string" calcext:value-type="string">
            <text:p>P-7</text:p>
          </table:table-cell>
          <table:table-cell office:value-type="float" office:value="7" calcext:value-type="float">
            <text:p>7</text:p>
          </table:table-cell>
          <table:table-cell office:value-type="string" calcext:value-type="string">
            <text:p>岡田以蔵</text:p>
          </table:table-cell>
          <table:table-cell office:value-type="string" calcext:value-type="string">
            <text:p>おかだいぞう</text:p>
          </table:table-cell>
          <table:table-cell office:value-type="string" calcext:value-type="string">
            <text:p>発展する医療デッキ</text:p>
          </table:table-cell>
          <table:table-cell table:formula="of:=VLOOKUP([.G220];[$収録番号.$A$1:$収録番号.$B$9];2;0)" office:value-type="float" office:value="30" calcext:value-type="float">
            <text:p>30</text:p>
          </table:table-cell>
          <table:table-cell office:value-type="string" calcext:value-type="string">
            <text:p>N</text:p>
          </table:table-cell>
          <table:table-cell table:formula="of:=VLOOKUP([.I220];[$レアリティ番号.$A$1:$レアリティ番号.$B$4];2;0)" office:value-type="float" office:value="1" calcext:value-type="float">
            <text:p>1</text:p>
          </table:table-cell>
          <table:table-cell office:value-type="string" calcext:value-type="string">
            <text:p>イジン</text:p>
          </table:table-cell>
          <table:table-cell table:formula="of:=VLOOKUP([.K220];[$種類番号.$A$1:$種類番号.$B$4];2;0)" office:value-type="float" office:value="1" calcext:value-type="float">
            <text:p>1</text:p>
          </table:table-cell>
          <table:table-cell office:value-type="string" calcext:value-type="string">
            <text:p>紫</text:p>
          </table:table-cell>
          <table:table-cell table:formula="of:=VLOOKUP([.M220];[$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0];[$能力語番号.$A$1:$能力語番号.$B$10];2;0);0)" office:value-type="float" office:value="0" calcext:value-type="float">
            <text:p>0</text:p>
          </table:table-cell>
          <table:table-cell office:value-type="string" calcext:value-type="string">
            <text:p>剣術</text:p>
          </table:table-cell>
          <table:table-cell table:formula="of:=IFERROR(VLOOKUP([.$S220];[$特性番号.$A$1:$特性番号.$B$8];2;0);0)" office:value-type="float" office:value="1" calcext:value-type="float">
            <text:p>1</text:p>
          </table:table-cell>
          <table:table-cell office:value-type="string" calcext:value-type="string">
            <text:p>即応¶相手の墓地のイジン1体につき「パワー+2000」を得る。¶パワー6000以上の間「寝たとき、イジンかガーディアンを1体を破壊する」を得る。</text:p>
          </table:table-cell>
          <table:table-cell table:formula="of:=NA()" office:value-type="string" office:string-value="" calcext:value-type="error">
            <text:p>#N/A</text:p>
          </table:table-cell>
          <table:table-cell table:formula="of:=IFERROR(VLOOKUP([.$V220];[$遺業能力番号.$A$1:$遺業能力番号.$B$9];2;0);0)" office:value-type="float" office:value="0" calcext:value-type="float">
            <text:p>0</text:p>
          </table:table-cell>
          <table:table-cell office:value-type="string" calcext:value-type="string">
            <text:p>https://one-draw.jp/ijinden/cardlist/P01/card/03_P_007.png</text:p>
          </table:table-cell>
          <table:table-cell table:formula="of:=CONCATENATE([$JSON.$A$1];[.$C220];[$JSON.$B$1];[.$E220];[$JSON.$C$1];[.$F220];[$JSON.$D$1];IF(ISNA([.$S220]);&quot;null&quot;;&quot;&quot;&quot;&quot;&amp;[.$S220]&amp;&quot;&quot;&quot;&quot;);[$JSON.$E$1];[.$U220];[$JSON.$F$1];IF(ISNA([.$V220]);&quot;null&quot;;&quot;&quot;&quot;&quot;&amp;[.$V220]&amp;&quot;&quot;&quot;&quot;);[$JSON.$G$1];[.$X220];[$JSON.$H$1];[.$H220];[$JSON.$I$1];[.J220];[$JSON.$J$1];[.$L220];[$JSON.$K$1];[.$O220];[$JSON.$L$1];[.$N220];[$JSON.$M$1];[.$R220];[$JSON.$N$1];[.$T220];[$JSON.$O$1];[.$W220];[$JSON.$P$1];[.$A220];[$JSON.$Q$1];[.$B220];[$JSON.$R$1])" office:value-type="string" office:string-value="{&quot;id&quot;:&quot;P-7&quot;,&quot;name&quot;:&quot;岡田以蔵&quot;,&quot;kana&quot;:&quot;おかだいぞう&quot;,&quot;traitText&quot;:&quot;剣術&quot;,&quot;ruleText&quot;:&quot;即応¶相手の墓地のイジン1体につき「パワー+2000」を得る。¶パワー6000以上の間「寝たとき、イジンかガーディアンを1体を破壊する」を得る。&quot;,&quot;legacyText&quot;:null,&quot;imageUrl&quot;:&quot;https://one-draw.jp/ijinden/cardlist/P01/card/03_P_007.png&quot;,&quot;expansion&quot;:30,&quot;rarity&quot;:1,&quot;type&quot;:1,&quot;level&quot;:5,&quot;color&quot;:16,&quot;term&quot;:0,&quot;trait&quot;:1,&quot;legacy&quot;:0,&quot;orderTable&quot;:219,&quot;orderDeck&quot;:177}," calcext:value-type="string">
            <text:p>{"id":"P-7","name":"岡田以蔵","kana":"おかだいぞう","traitText":"剣術","ruleText":"即応¶相手の墓地のイジン1体につき「パワー+2000」を得る。¶パワー6000以上の間「寝たとき、イジンかガーディアンを1体を破壊する」を得る。","legacyText":null,"imageUrl":"https://one-draw.jp/ijinden/cardlist/P01/card/03_P_007.png","expansion":30,"rarity":1,"type":1,"level":5,"color":16,"term":0,"trait":1,"legacy":0,"orderTable":219,"orderDeck":177},</text:p>
          </table:table-cell>
          <table:table-cell table:number-columns-repeated="16347"/>
        </table:table-row>
        <table:table-row table:style-name="ro2">
          <table:table-cell office:value-type="float" office:value="220" calcext:value-type="float">
            <text:p>220</text:p>
          </table:table-cell>
          <table:table-cell office:value-type="float" office:value="102" calcext:value-type="float">
            <text:p>102</text:p>
          </table:table-cell>
          <table:table-cell office:value-type="string" calcext:value-type="string">
            <text:p>P-8</text:p>
          </table:table-cell>
          <table:table-cell office:value-type="float" office:value="8" calcext:value-type="float">
            <text:p>8</text:p>
          </table:table-cell>
          <table:table-cell office:value-type="string" calcext:value-type="string">
            <text:p>クララ・バートン</text:p>
          </table:table-cell>
          <table:table-cell office:value-type="string" calcext:value-type="string">
            <text:p>くららばーとん</text:p>
          </table:table-cell>
          <table:table-cell office:value-type="string" calcext:value-type="string">
            <text:p>発展する医療デッキ</text:p>
          </table:table-cell>
          <table:table-cell table:formula="of:=VLOOKUP([.G221];[$収録番号.$A$1:$収録番号.$B$9];2;0)" office:value-type="float" office:value="30" calcext:value-type="float">
            <text:p>30</text:p>
          </table:table-cell>
          <table:table-cell office:value-type="string" calcext:value-type="string">
            <text:p>N</text:p>
          </table:table-cell>
          <table:table-cell table:formula="of:=VLOOKUP([.I221];[$レアリティ番号.$A$1:$レアリティ番号.$B$4];2;0)" office:value-type="float" office:value="1" calcext:value-type="float">
            <text:p>1</text:p>
          </table:table-cell>
          <table:table-cell office:value-type="string" calcext:value-type="string">
            <text:p>イジン</text:p>
          </table:table-cell>
          <table:table-cell table:formula="of:=VLOOKUP([.K221];[$種類番号.$A$1:$種類番号.$B$4];2;0)" office:value-type="float" office:value="1" calcext:value-type="float">
            <text:p>1</text:p>
          </table:table-cell>
          <table:table-cell office:value-type="string" calcext:value-type="string">
            <text:p>紫</text:p>
          </table:table-cell>
          <table:table-cell table:formula="of:=VLOOKUP([.M221];[$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1];[$能力語番号.$A$1:$能力語番号.$B$10];2;0);0)" office:value-type="float" office:value="0" calcext:value-type="float">
            <text:p>0</text:p>
          </table:table-cell>
          <table:table-cell office:value-type="string" calcext:value-type="string">
            <text:p>医術</text:p>
          </table:table-cell>
          <table:table-cell table:formula="of:=IFERROR(VLOOKUP([.$S221];[$特性番号.$A$1:$特性番号.$B$8];2;0);0)" office:value-type="float" office:value="16" calcext:value-type="float">
            <text:p>16</text:p>
          </table:table-cell>
          <table:table-cell office:value-type="string" calcext:value-type="string">
            <text:p>戦場のカードが破壊されたとき、自分の魔力ゾーンのマリョク1つを裏にして、破壊されているカード1つを指定して発動できる。その破壊されているカードを手札に戻す。</text:p>
          </table:table-cell>
          <table:table-cell table:formula="of:=NA()" office:value-type="string" office:string-value="" calcext:value-type="error">
            <text:p>#N/A</text:p>
          </table:table-cell>
          <table:table-cell table:formula="of:=IFERROR(VLOOKUP([.$V221];[$遺業能力番号.$A$1:$遺業能力番号.$B$9];2;0);0)" office:value-type="float" office:value="0" calcext:value-type="float">
            <text:p>0</text:p>
          </table:table-cell>
          <table:table-cell office:value-type="string" calcext:value-type="string">
            <text:p>https://one-draw.jp/ijinden/cardlist/P01/card/03_P_008.png</text:p>
          </table:table-cell>
          <table:table-cell table:formula="of:=CONCATENATE([$JSON.$A$1];[.$C221];[$JSON.$B$1];[.$E221];[$JSON.$C$1];[.$F221];[$JSON.$D$1];IF(ISNA([.$S221]);&quot;null&quot;;&quot;&quot;&quot;&quot;&amp;[.$S221]&amp;&quot;&quot;&quot;&quot;);[$JSON.$E$1];[.$U221];[$JSON.$F$1];IF(ISNA([.$V221]);&quot;null&quot;;&quot;&quot;&quot;&quot;&amp;[.$V221]&amp;&quot;&quot;&quot;&quot;);[$JSON.$G$1];[.$X221];[$JSON.$H$1];[.$H221];[$JSON.$I$1];[.J221];[$JSON.$J$1];[.$L221];[$JSON.$K$1];[.$O221];[$JSON.$L$1];[.$N221];[$JSON.$M$1];[.$R221];[$JSON.$N$1];[.$T221];[$JSON.$O$1];[.$W221];[$JSON.$P$1];[.$A221];[$JSON.$Q$1];[.$B221];[$JSON.$R$1])" office:value-type="string" office:string-value="{&quot;id&quot;:&quot;P-8&quot;,&quot;name&quot;:&quot;クララ・バートン&quot;,&quot;kana&quot;:&quot;くららばーとん&quot;,&quot;traitText&quot;:&quot;医術&quot;,&quot;ruleText&quot;:&quot;戦場のカードが破壊されたとき、自分の魔力ゾーンのマリョク1つを裏にして、破壊されているカード1つを指定して発動できる。その破壊されているカードを手札に戻す。&quot;,&quot;legacyText&quot;:null,&quot;imageUrl&quot;:&quot;https://one-draw.jp/ijinden/cardlist/P01/card/03_P_008.png&quot;,&quot;expansion&quot;:30,&quot;rarity&quot;:1,&quot;type&quot;:1,&quot;level&quot;:3,&quot;color&quot;:16,&quot;term&quot;:0,&quot;trait&quot;:16,&quot;legacy&quot;:0,&quot;orderTable&quot;:220,&quot;orderDeck&quot;:102}," calcext:value-type="string">
            <text:p>{"id":"P-8","name":"クララ・バートン","kana":"くららばーとん","traitText":"医術","ruleText":"戦場のカードが破壊されたとき、自分の魔力ゾーンのマリョク1つを裏にして、破壊されているカード1つを指定して発動できる。その破壊されているカードを手札に戻す。","legacyText":null,"imageUrl":"https://one-draw.jp/ijinden/cardlist/P01/card/03_P_008.png","expansion":30,"rarity":1,"type":1,"level":3,"color":16,"term":0,"trait":16,"legacy":0,"orderTable":220,"orderDeck":102},</text:p>
          </table:table-cell>
          <table:table-cell table:number-columns-repeated="16347"/>
        </table:table-row>
        <table:table-row table:style-name="ro2">
          <table:table-cell office:value-type="float" office:value="221" calcext:value-type="float">
            <text:p>221</text:p>
          </table:table-cell>
          <table:table-cell office:value-type="float" office:value="277" calcext:value-type="float">
            <text:p>277</text:p>
          </table:table-cell>
          <table:table-cell office:value-type="string" calcext:value-type="string">
            <text:p>P-9</text:p>
          </table:table-cell>
          <table:table-cell office:value-type="float" office:value="9" calcext:value-type="float">
            <text:p>9</text:p>
          </table:table-cell>
          <table:table-cell office:value-type="string" calcext:value-type="string">
            <text:p>虎狼痢</text:p>
          </table:table-cell>
          <table:table-cell office:value-type="string" calcext:value-type="string">
            <text:p>ころり</text:p>
          </table:table-cell>
          <table:table-cell office:value-type="string" calcext:value-type="string">
            <text:p>発展する医療デッキ</text:p>
          </table:table-cell>
          <table:table-cell table:formula="of:=VLOOKUP([.G222];[$収録番号.$A$1:$収録番号.$B$9];2;0)" office:value-type="float" office:value="30" calcext:value-type="float">
            <text:p>30</text:p>
          </table:table-cell>
          <table:table-cell office:value-type="string" calcext:value-type="string">
            <text:p>N</text:p>
          </table:table-cell>
          <table:table-cell table:formula="of:=VLOOKUP([.I222];[$レアリティ番号.$A$1:$レアリティ番号.$B$4];2;0)" office:value-type="float" office:value="1" calcext:value-type="float">
            <text:p>1</text:p>
          </table:table-cell>
          <table:table-cell office:value-type="string" calcext:value-type="string">
            <text:p>ハイケイ</text:p>
          </table:table-cell>
          <table:table-cell table:formula="of:=VLOOKUP([.K222];[$種類番号.$A$1:$種類番号.$B$4];2;0)" office:value-type="float" office:value="2" calcext:value-type="float">
            <text:p>2</text:p>
          </table:table-cell>
          <table:table-cell office:value-type="string" calcext:value-type="string">
            <text:p>紫</text:p>
          </table:table-cell>
          <table:table-cell table:formula="of:=VLOOKUP([.M222];[$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2];[$特性番号.$A$1:$特性番号.$B$8];2;0);0)" office:value-type="float" office:value="0" calcext:value-type="float">
            <text:p>0</text:p>
          </table:table-cell>
          <table:table-cell office:value-type="string" calcext:value-type="string">
            <text:p>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text:p>
          </table:table-cell>
          <table:table-cell office:value-type="string" calcext:value-type="string">
            <text:p>手札に戻す</text:p>
          </table:table-cell>
          <table:table-cell table:formula="of:=IFERROR(VLOOKUP([.$V222];[$遺業能力番号.$A$1:$遺業能力番号.$B$9];2;0);0)" office:value-type="float" office:value="5" calcext:value-type="float">
            <text:p>5</text:p>
          </table:table-cell>
          <table:table-cell office:value-type="string" calcext:value-type="string">
            <text:p>https://one-draw.jp/ijinden/cardlist/P01/card/03_P_009.png</text:p>
          </table:table-cell>
          <table:table-cell table:formula="of:=CONCATENATE([$JSON.$A$1];[.$C222];[$JSON.$B$1];[.$E222];[$JSON.$C$1];[.$F222];[$JSON.$D$1];IF(ISNA([.$S222]);&quot;null&quot;;&quot;&quot;&quot;&quot;&amp;[.$S222]&amp;&quot;&quot;&quot;&quot;);[$JSON.$E$1];[.$U222];[$JSON.$F$1];IF(ISNA([.$V222]);&quot;null&quot;;&quot;&quot;&quot;&quot;&amp;[.$V222]&amp;&quot;&quot;&quot;&quot;);[$JSON.$G$1];[.$X222];[$JSON.$H$1];[.$H222];[$JSON.$I$1];[.J222];[$JSON.$J$1];[.$L222];[$JSON.$K$1];[.$O222];[$JSON.$L$1];[.$N222];[$JSON.$M$1];[.$R222];[$JSON.$N$1];[.$T222];[$JSON.$O$1];[.$W222];[$JSON.$P$1];[.$A222];[$JSON.$Q$1];[.$B222];[$JSON.$R$1])" office:value-type="string" office:string-value="{&quot;id&quot;:&quot;P-9&quot;,&quot;name&quot;:&quot;虎狼痢&quot;,&quot;kana&quot;:&quot;ころり&quot;,&quot;traitText&quot;:null,&quot;ruleText&quot;:&quot;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quot;,&quot;legacyText&quot;:&quot;手札に戻す&quot;,&quot;imageUrl&quot;:&quot;https://one-draw.jp/ijinden/cardlist/P01/card/03_P_009.png&quot;,&quot;expansion&quot;:30,&quot;rarity&quot;:1,&quot;type&quot;:2,&quot;level&quot;:6,&quot;color&quot;:16,&quot;term&quot;:0,&quot;trait&quot;:0,&quot;legacy&quot;:5,&quot;orderTable&quot;:221,&quot;orderDeck&quot;:277}," calcext:value-type="string">
            <text:p>{"id":"P-9","name":"虎狼痢","kana":"ころり","traitText":null,"ruleText":"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legacyText":"手札に戻す","imageUrl":"https://one-draw.jp/ijinden/cardlist/P01/card/03_P_009.png","expansion":30,"rarity":1,"type":2,"level":6,"color":16,"term":0,"trait":0,"legacy":5,"orderTable":221,"orderDeck":277},</text:p>
          </table:table-cell>
          <table:table-cell table:number-columns-repeated="16347"/>
        </table:table-row>
        <table:table-row table:style-name="ro2">
          <table:table-cell office:value-type="float" office:value="222" calcext:value-type="float">
            <text:p>222</text:p>
          </table:table-cell>
          <table:table-cell office:value-type="float" office:value="271" calcext:value-type="float">
            <text:p>271</text:p>
          </table:table-cell>
          <table:table-cell office:value-type="string" calcext:value-type="string">
            <text:p>P-10</text:p>
          </table:table-cell>
          <table:table-cell office:value-type="float" office:value="10" calcext:value-type="float">
            <text:p>10</text:p>
          </table:table-cell>
          <table:table-cell office:value-type="string" calcext:value-type="string">
            <text:p>浪士集う長屋</text:p>
          </table:table-cell>
          <table:table-cell office:value-type="string" calcext:value-type="string">
            <text:p>ろうしつどうながや</text:p>
          </table:table-cell>
          <table:table-cell office:value-type="string" calcext:value-type="string">
            <text:p>発展する医療デッキ</text:p>
          </table:table-cell>
          <table:table-cell table:formula="of:=VLOOKUP([.G223];[$収録番号.$A$1:$収録番号.$B$9];2;0)" office:value-type="float" office:value="30" calcext:value-type="float">
            <text:p>30</text:p>
          </table:table-cell>
          <table:table-cell office:value-type="string" calcext:value-type="string">
            <text:p>N</text:p>
          </table:table-cell>
          <table:table-cell table:formula="of:=VLOOKUP([.I223];[$レアリティ番号.$A$1:$レアリティ番号.$B$4];2;0)" office:value-type="float" office:value="1" calcext:value-type="float">
            <text:p>1</text:p>
          </table:table-cell>
          <table:table-cell office:value-type="string" calcext:value-type="string">
            <text:p>ハイケイ</text:p>
          </table:table-cell>
          <table:table-cell table:formula="of:=VLOOKUP([.K223];[$種類番号.$A$1:$種類番号.$B$4];2;0)" office:value-type="float" office:value="2" calcext:value-type="float">
            <text:p>2</text:p>
          </table:table-cell>
          <table:table-cell office:value-type="string" calcext:value-type="string">
            <text:p>紫</text:p>
          </table:table-cell>
          <table:table-cell table:formula="of:=VLOOKUP([.M223];[$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3];[$特性番号.$A$1:$特性番号.$B$8];2;0);0)" office:value-type="float" office:value="0" calcext:value-type="float">
            <text:p>0</text:p>
          </table:table-cell>
          <table:table-cell office:value-type="string" calcext:value-type="string">
            <text:p>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text:p>
          </table:table-cell>
          <table:table-cell table:formula="of:=NA()" office:value-type="string" office:string-value="" calcext:value-type="error">
            <text:p>#N/A</text:p>
          </table:table-cell>
          <table:table-cell table:formula="of:=IFERROR(VLOOKUP([.$V223];[$遺業能力番号.$A$1:$遺業能力番号.$B$9];2;0);0)" office:value-type="float" office:value="0" calcext:value-type="float">
            <text:p>0</text:p>
          </table:table-cell>
          <table:table-cell office:value-type="string" calcext:value-type="string">
            <text:p>https://one-draw.jp/ijinden/cardlist/P01/card/03_P_010.png</text:p>
          </table:table-cell>
          <table:table-cell table:formula="of:=CONCATENATE([$JSON.$A$1];[.$C223];[$JSON.$B$1];[.$E223];[$JSON.$C$1];[.$F223];[$JSON.$D$1];IF(ISNA([.$S223]);&quot;null&quot;;&quot;&quot;&quot;&quot;&amp;[.$S223]&amp;&quot;&quot;&quot;&quot;);[$JSON.$E$1];[.$U223];[$JSON.$F$1];IF(ISNA([.$V223]);&quot;null&quot;;&quot;&quot;&quot;&quot;&amp;[.$V223]&amp;&quot;&quot;&quot;&quot;);[$JSON.$G$1];[.$X223];[$JSON.$H$1];[.$H223];[$JSON.$I$1];[.J223];[$JSON.$J$1];[.$L223];[$JSON.$K$1];[.$O223];[$JSON.$L$1];[.$N223];[$JSON.$M$1];[.$R223];[$JSON.$N$1];[.$T223];[$JSON.$O$1];[.$W223];[$JSON.$P$1];[.$A223];[$JSON.$Q$1];[.$B223];[$JSON.$R$1])" office:value-type="string" office:string-value="{&quot;id&quot;:&quot;P-10&quot;,&quot;name&quot;:&quot;浪士集う長屋&quot;,&quot;kana&quot;:&quot;ろうしつどうながや&quot;,&quot;traitText&quot;:null,&quot;ruleText&quot;:&quot;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quot;,&quot;legacyText&quot;:null,&quot;imageUrl&quot;:&quot;https://one-draw.jp/ijinden/cardlist/P01/card/03_P_010.png&quot;,&quot;expansion&quot;:30,&quot;rarity&quot;:1,&quot;type&quot;:2,&quot;level&quot;:5,&quot;color&quot;:16,&quot;term&quot;:0,&quot;trait&quot;:0,&quot;legacy&quot;:0,&quot;orderTable&quot;:222,&quot;orderDeck&quot;:271}," calcext:value-type="string">
            <text:p>{"id":"P-10","name":"浪士集う長屋","kana":"ろうしつどうながや","traitText":null,"ruleText":"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legacyText":null,"imageUrl":"https://one-draw.jp/ijinden/cardlist/P01/card/03_P_010.png","expansion":30,"rarity":1,"type":2,"level":5,"color":16,"term":0,"trait":0,"legacy":0,"orderTable":222,"orderDeck":271},</text:p>
          </table:table-cell>
          <table:table-cell table:number-columns-repeated="16347"/>
        </table:table-row>
        <table:table-row table:style-name="ro2">
          <table:table-cell office:value-type="float" office:value="223" calcext:value-type="float">
            <text:p>223</text:p>
          </table:table-cell>
          <table:table-cell office:value-type="float" office:value="286" calcext:value-type="float">
            <text:p>286</text:p>
          </table:table-cell>
          <table:table-cell office:value-type="string" calcext:value-type="string">
            <text:p>P-11</text:p>
          </table:table-cell>
          <table:table-cell office:value-type="float" office:value="11" calcext:value-type="float">
            <text:p>11</text:p>
          </table:table-cell>
          <table:table-cell office:value-type="string" calcext:value-type="string">
            <text:p>スピリットアウェイ</text:p>
          </table:table-cell>
          <table:table-cell office:value-type="string" calcext:value-type="string">
            <text:p>すぴりっとあうぇい</text:p>
          </table:table-cell>
          <table:table-cell office:value-type="string" calcext:value-type="string">
            <text:p>発展する医療デッキ</text:p>
          </table:table-cell>
          <table:table-cell table:formula="of:=VLOOKUP([.G224];[$収録番号.$A$1:$収録番号.$B$9];2;0)" office:value-type="float" office:value="30" calcext:value-type="float">
            <text:p>30</text:p>
          </table:table-cell>
          <table:table-cell office:value-type="string" calcext:value-type="string">
            <text:p>N</text:p>
          </table:table-cell>
          <table:table-cell table:formula="of:=VLOOKUP([.I224];[$レアリティ番号.$A$1:$レアリティ番号.$B$4];2;0)" office:value-type="float" office:value="1" calcext:value-type="float">
            <text:p>1</text:p>
          </table:table-cell>
          <table:table-cell office:value-type="string" calcext:value-type="string">
            <text:p>マホウ</text:p>
          </table:table-cell>
          <table:table-cell table:formula="of:=VLOOKUP([.K224];[$種類番号.$A$1:$種類番号.$B$4];2;0)" office:value-type="float" office:value="3" calcext:value-type="float">
            <text:p>3</text:p>
          </table:table-cell>
          <table:table-cell office:value-type="string" calcext:value-type="string">
            <text:p>紫</text:p>
          </table:table-cell>
          <table:table-cell table:formula="of:=VLOOKUP([.M224];[$色番号.$A$1:$色番号.$B$10];2;0)" office:value-type="float" office:value="16" calcext:value-type="float">
            <text:p>16</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Q2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4];[$特性番号.$A$1:$特性番号.$B$8];2;0);0)" office:value-type="float" office:value="0" calcext:value-type="float">
            <text:p>0</text:p>
          </table:table-cell>
          <table:table-cell office:value-type="string" calcext:value-type="string">
            <text:p>自分の戦場のガーディアン1体を手札に戻して、相手の山札の上から2枚を墓地に置いて、マリョク配置権+1する。</text:p>
          </table:table-cell>
          <table:table-cell office:value-type="string" calcext:value-type="string">
            <text:p>魔力化</text:p>
          </table:table-cell>
          <table:table-cell table:formula="of:=IFERROR(VLOOKUP([.$V224];[$遺業能力番号.$A$1:$遺業能力番号.$B$9];2;0);0)" office:value-type="float" office:value="1" calcext:value-type="float">
            <text:p>1</text:p>
          </table:table-cell>
          <table:table-cell office:value-type="string" calcext:value-type="string">
            <text:p>https://one-draw.jp/ijinden/cardlist/P01/card/03_P_011.png</text:p>
          </table:table-cell>
          <table:table-cell table:formula="of:=CONCATENATE([$JSON.$A$1];[.$C224];[$JSON.$B$1];[.$E224];[$JSON.$C$1];[.$F224];[$JSON.$D$1];IF(ISNA([.$S224]);&quot;null&quot;;&quot;&quot;&quot;&quot;&amp;[.$S224]&amp;&quot;&quot;&quot;&quot;);[$JSON.$E$1];[.$U224];[$JSON.$F$1];IF(ISNA([.$V224]);&quot;null&quot;;&quot;&quot;&quot;&quot;&amp;[.$V224]&amp;&quot;&quot;&quot;&quot;);[$JSON.$G$1];[.$X224];[$JSON.$H$1];[.$H224];[$JSON.$I$1];[.J224];[$JSON.$J$1];[.$L224];[$JSON.$K$1];[.$O224];[$JSON.$L$1];[.$N224];[$JSON.$M$1];[.$R224];[$JSON.$N$1];[.$T224];[$JSON.$O$1];[.$W224];[$JSON.$P$1];[.$A224];[$JSON.$Q$1];[.$B224];[$JSON.$R$1])" office:value-type="string" office:string-value="{&quot;id&quot;:&quot;P-11&quot;,&quot;name&quot;:&quot;スピリットアウェイ&quot;,&quot;kana&quot;:&quot;すぴりっとあうぇい&quot;,&quot;traitText&quot;:null,&quot;ruleText&quot;:&quot;自分の戦場のガーディアン1体を手札に戻して、相手の山札の上から2枚を墓地に置いて、マリョク配置権+1する。&quot;,&quot;legacyText&quot;:&quot;魔力化&quot;,&quot;imageUrl&quot;:&quot;https://one-draw.jp/ijinden/cardlist/P01/card/03_P_011.png&quot;,&quot;expansion&quot;:30,&quot;rarity&quot;:1,&quot;type&quot;:3,&quot;level&quot;:1,&quot;color&quot;:16,&quot;term&quot;:0,&quot;trait&quot;:0,&quot;legacy&quot;:1,&quot;orderTable&quot;:223,&quot;orderDeck&quot;:286}," calcext:value-type="string">
            <text:p>{"id":"P-11","name":"スピリットアウェイ","kana":"すぴりっとあうぇい","traitText":null,"ruleText":"自分の戦場のガーディアン1体を手札に戻して、相手の山札の上から2枚を墓地に置いて、マリョク配置権+1する。","legacyText":"魔力化","imageUrl":"https://one-draw.jp/ijinden/cardlist/P01/card/03_P_011.png","expansion":30,"rarity":1,"type":3,"level":1,"color":16,"term":0,"trait":0,"legacy":1,"orderTable":223,"orderDeck":286},</text:p>
          </table:table-cell>
          <table:table-cell table:number-columns-repeated="16347"/>
        </table:table-row>
        <table:table-row table:style-name="ro2">
          <table:table-cell office:value-type="float" office:value="224" calcext:value-type="float">
            <text:p>224</text:p>
          </table:table-cell>
          <table:table-cell office:value-type="float" office:value="324" calcext:value-type="float">
            <text:p>324</text:p>
          </table:table-cell>
          <table:table-cell office:value-type="string" calcext:value-type="string">
            <text:p>P-12</text:p>
          </table:table-cell>
          <table:table-cell office:value-type="float" office:value="12" calcext:value-type="float">
            <text:p>12</text:p>
          </table:table-cell>
          <table:table-cell office:value-type="string" calcext:value-type="string">
            <text:p>タイムディレイション</text:p>
          </table:table-cell>
          <table:table-cell office:value-type="string" calcext:value-type="string">
            <text:p>たいむでぃれいしょん</text:p>
          </table:table-cell>
          <table:table-cell office:value-type="string" calcext:value-type="string">
            <text:p>発展する医療デッキ</text:p>
          </table:table-cell>
          <table:table-cell table:formula="of:=VLOOKUP([.G225];[$収録番号.$A$1:$収録番号.$B$9];2;0)" office:value-type="float" office:value="30" calcext:value-type="float">
            <text:p>30</text:p>
          </table:table-cell>
          <table:table-cell office:value-type="string" calcext:value-type="string">
            <text:p>N</text:p>
          </table:table-cell>
          <table:table-cell table:formula="of:=VLOOKUP([.I225];[$レアリティ番号.$A$1:$レアリティ番号.$B$4];2;0)" office:value-type="float" office:value="1" calcext:value-type="float">
            <text:p>1</text:p>
          </table:table-cell>
          <table:table-cell office:value-type="string" calcext:value-type="string">
            <text:p>マホウ</text:p>
          </table:table-cell>
          <table:table-cell table:formula="of:=VLOOKUP([.K225];[$種類番号.$A$1:$種類番号.$B$4];2;0)" office:value-type="float" office:value="3" calcext:value-type="float">
            <text:p>3</text:p>
          </table:table-cell>
          <table:table-cell office:value-type="string" calcext:value-type="string">
            <text:p>紫</text:p>
          </table:table-cell>
          <table:table-cell table:formula="of:=VLOOKUP([.M225];[$色番号.$A$1:$色番号.$B$10];2;0)" office:value-type="float" office:value="16" calcext:value-type="float">
            <text:p>16</text:p>
          </table:table-cell>
          <table:table-cell office:value-type="float" office:value="4" calcext:value-type="float">
            <text:p>4</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22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5];[$特性番号.$A$1:$特性番号.$B$8];2;0);0)" office:value-type="float" office:value="0" calcext:value-type="float">
            <text:p>0</text:p>
          </table:table-cell>
          <table:table-cell office:value-type="string" calcext:value-type="string">
            <text:p>これを裏にして魔力ゾーンに置く。その後バトルを中断する。ターンプレイヤーは残りのフェイズを行わずにターンを終了する。</text:p>
          </table:table-cell>
          <table:table-cell office:value-type="string" calcext:value-type="string">
            <text:p>冥府発動</text:p>
          </table:table-cell>
          <table:table-cell table:formula="of:=IFERROR(VLOOKUP([.$V225];[$遺業能力番号.$A$1:$遺業能力番号.$B$9];2;0);0)" office:value-type="float" office:value="2" calcext:value-type="float">
            <text:p>2</text:p>
          </table:table-cell>
          <table:table-cell office:value-type="string" calcext:value-type="string">
            <text:p>https://one-draw.jp/ijinden/cardlist/P01/card/03_P_012.png</text:p>
          </table:table-cell>
          <table:table-cell table:formula="of:=CONCATENATE([$JSON.$A$1];[.$C225];[$JSON.$B$1];[.$E225];[$JSON.$C$1];[.$F225];[$JSON.$D$1];IF(ISNA([.$S225]);&quot;null&quot;;&quot;&quot;&quot;&quot;&amp;[.$S225]&amp;&quot;&quot;&quot;&quot;);[$JSON.$E$1];[.$U225];[$JSON.$F$1];IF(ISNA([.$V225]);&quot;null&quot;;&quot;&quot;&quot;&quot;&amp;[.$V225]&amp;&quot;&quot;&quot;&quot;);[$JSON.$G$1];[.$X225];[$JSON.$H$1];[.$H225];[$JSON.$I$1];[.J225];[$JSON.$J$1];[.$L225];[$JSON.$K$1];[.$O225];[$JSON.$L$1];[.$N225];[$JSON.$M$1];[.$R225];[$JSON.$N$1];[.$T225];[$JSON.$O$1];[.$W225];[$JSON.$P$1];[.$A225];[$JSON.$Q$1];[.$B225];[$JSON.$R$1])" office:value-type="string" office:string-value="{&quot;id&quot;:&quot;P-12&quot;,&quot;name&quot;:&quot;タイムディレイション&quot;,&quot;kana&quot;:&quot;たいむでぃれいしょん&quot;,&quot;traitText&quot;:null,&quot;ruleText&quot;:&quot;これを裏にして魔力ゾーンに置く。その後バトルを中断する。ターンプレイヤーは残りのフェイズを行わずにターンを終了する。&quot;,&quot;legacyText&quot;:&quot;冥府発動&quot;,&quot;imageUrl&quot;:&quot;https://one-draw.jp/ijinden/cardlist/P01/card/03_P_012.png&quot;,&quot;expansion&quot;:30,&quot;rarity&quot;:1,&quot;type&quot;:3,&quot;level&quot;:4,&quot;color&quot;:16,&quot;term&quot;:0,&quot;trait&quot;:0,&quot;legacy&quot;:2,&quot;orderTable&quot;:224,&quot;orderDeck&quot;:324}," calcext:value-type="string">
            <text:p>{"id":"P-12","name":"タイムディレイション","kana":"たいむでぃれいしょん","traitText":null,"ruleText":"これを裏にして魔力ゾーンに置く。その後バトルを中断する。ターンプレイヤーは残りのフェイズを行わずにターンを終了する。","legacyText":"冥府発動","imageUrl":"https://one-draw.jp/ijinden/cardlist/P01/card/03_P_012.png","expansion":30,"rarity":1,"type":3,"level":4,"color":16,"term":0,"trait":0,"legacy":2,"orderTable":224,"orderDeck":324},</text:p>
          </table:table-cell>
          <table:table-cell table:number-columns-repeated="16347"/>
        </table:table-row>
        <table:table-row table:style-name="ro2">
          <table:table-cell office:value-type="float" office:value="225" calcext:value-type="float">
            <text:p>225</text:p>
          </table:table-cell>
          <table:table-cell office:value-type="float" office:value="366" calcext:value-type="float">
            <text:p>366</text:p>
          </table:table-cell>
          <table:table-cell office:value-type="string" calcext:value-type="string">
            <text:p>P-13</text:p>
          </table:table-cell>
          <table:table-cell office:value-type="float" office:value="13" calcext:value-type="float">
            <text:p>13</text:p>
          </table:table-cell>
          <table:table-cell office:value-type="string" calcext:value-type="string">
            <text:p>ハンドミラー</text:p>
          </table:table-cell>
          <table:table-cell office:value-type="string" calcext:value-type="string">
            <text:p>はんどみらー</text:p>
          </table:table-cell>
          <table:table-cell office:value-type="string" calcext:value-type="string">
            <text:p>発展する医療デッキ</text:p>
          </table:table-cell>
          <table:table-cell table:formula="of:=VLOOKUP([.G226];[$収録番号.$A$1:$収録番号.$B$9];2;0)" office:value-type="float" office:value="30" calcext:value-type="float">
            <text:p>30</text:p>
          </table:table-cell>
          <table:table-cell office:value-type="string" calcext:value-type="string">
            <text:p>N</text:p>
          </table:table-cell>
          <table:table-cell table:formula="of:=VLOOKUP([.I226];[$レアリティ番号.$A$1:$レアリティ番号.$B$4];2;0)" office:value-type="float" office:value="1" calcext:value-type="float">
            <text:p>1</text:p>
          </table:table-cell>
          <table:table-cell office:value-type="string" calcext:value-type="string">
            <text:p>マリョク</text:p>
          </table:table-cell>
          <table:table-cell table:formula="of:=VLOOKUP([.K226];[$種類番号.$A$1:$種類番号.$B$4];2;0)" office:value-type="float" office:value="4" calcext:value-type="float">
            <text:p>4</text:p>
          </table:table-cell>
          <table:table-cell office:value-type="string" calcext:value-type="string">
            <text:p>紫</text:p>
          </table:table-cell>
          <table:table-cell table:formula="of:=VLOOKUP([.M226];[$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6];[$特性番号.$A$1:$特性番号.$B$8];2;0);0)" office:value-type="float" office:value="0" calcext:value-type="float">
            <text:p>0</text:p>
          </table:table-cell>
          <table:table-cell office:value-type="string" calcext:value-type="string">
            <text:p>魔力ゾーンに置かれたとき、1ドローする。</text:p>
          </table:table-cell>
          <table:table-cell table:formula="of:=NA()" office:value-type="string" office:string-value="" calcext:value-type="error">
            <text:p>#N/A</text:p>
          </table:table-cell>
          <table:table-cell table:formula="of:=IFERROR(VLOOKUP([.$V226];[$遺業能力番号.$A$1:$遺業能力番号.$B$9];2;0);0)" office:value-type="float" office:value="0" calcext:value-type="float">
            <text:p>0</text:p>
          </table:table-cell>
          <table:table-cell office:value-type="string" calcext:value-type="string">
            <text:p>https://one-draw.jp/ijinden/cardlist/P01/card/03_P_013.png</text:p>
          </table:table-cell>
          <table:table-cell table:formula="of:=CONCATENATE([$JSON.$A$1];[.$C226];[$JSON.$B$1];[.$E226];[$JSON.$C$1];[.$F226];[$JSON.$D$1];IF(ISNA([.$S226]);&quot;null&quot;;&quot;&quot;&quot;&quot;&amp;[.$S226]&amp;&quot;&quot;&quot;&quot;);[$JSON.$E$1];[.$U226];[$JSON.$F$1];IF(ISNA([.$V226]);&quot;null&quot;;&quot;&quot;&quot;&quot;&amp;[.$V226]&amp;&quot;&quot;&quot;&quot;);[$JSON.$G$1];[.$X226];[$JSON.$H$1];[.$H226];[$JSON.$I$1];[.J226];[$JSON.$J$1];[.$L226];[$JSON.$K$1];[.$O226];[$JSON.$L$1];[.$N226];[$JSON.$M$1];[.$R226];[$JSON.$N$1];[.$T226];[$JSON.$O$1];[.$W226];[$JSON.$P$1];[.$A226];[$JSON.$Q$1];[.$B226];[$JSON.$R$1])" office:value-type="string" office:string-value="{&quot;id&quot;:&quot;P-13&quot;,&quot;name&quot;:&quot;ハンドミラー&quot;,&quot;kana&quot;:&quot;はんどみらー&quot;,&quot;traitText&quot;:null,&quot;ruleText&quot;:&quot;魔力ゾーンに置かれたとき、1ドローする。&quot;,&quot;legacyText&quot;:null,&quot;imageUrl&quot;:&quot;https://one-draw.jp/ijinden/cardlist/P01/card/03_P_013.png&quot;,&quot;expansion&quot;:30,&quot;rarity&quot;:1,&quot;type&quot;:4,&quot;level&quot;:1,&quot;color&quot;:16,&quot;term&quot;:0,&quot;trait&quot;:0,&quot;legacy&quot;:0,&quot;orderTable&quot;:225,&quot;orderDeck&quot;:366}," calcext:value-type="string">
            <text:p>{"id":"P-13","name":"ハンドミラー","kana":"はんどみらー","traitText":null,"ruleText":"魔力ゾーンに置かれたとき、1ドローする。","legacyText":null,"imageUrl":"https://one-draw.jp/ijinden/cardlist/P01/card/03_P_013.png","expansion":30,"rarity":1,"type":4,"level":1,"color":16,"term":0,"trait":0,"legacy":0,"orderTable":225,"orderDeck":366},</text:p>
          </table:table-cell>
          <table:table-cell table:number-columns-repeated="16347"/>
        </table:table-row>
        <table:table-row table:style-name="ro2">
          <table:table-cell office:value-type="float" office:value="226" calcext:value-type="float">
            <text:p>226</text:p>
          </table:table-cell>
          <table:table-cell office:value-type="float" office:value="367" calcext:value-type="float">
            <text:p>367</text:p>
          </table:table-cell>
          <table:table-cell office:value-type="string" calcext:value-type="string">
            <text:p>P-14</text:p>
          </table:table-cell>
          <table:table-cell office:value-type="float" office:value="14" calcext:value-type="float">
            <text:p>14</text:p>
          </table:table-cell>
          <table:table-cell office:value-type="string" calcext:value-type="string">
            <text:p>ブラックブレイド</text:p>
          </table:table-cell>
          <table:table-cell office:value-type="string" calcext:value-type="string">
            <text:p>ぶらっくぶれいど</text:p>
          </table:table-cell>
          <table:table-cell office:value-type="string" calcext:value-type="string">
            <text:p>発展する医療デッキ</text:p>
          </table:table-cell>
          <table:table-cell table:formula="of:=VLOOKUP([.G227];[$収録番号.$A$1:$収録番号.$B$9];2;0)" office:value-type="float" office:value="30" calcext:value-type="float">
            <text:p>30</text:p>
          </table:table-cell>
          <table:table-cell office:value-type="string" calcext:value-type="string">
            <text:p>N</text:p>
          </table:table-cell>
          <table:table-cell table:formula="of:=VLOOKUP([.I227];[$レアリティ番号.$A$1:$レアリティ番号.$B$4];2;0)" office:value-type="float" office:value="1" calcext:value-type="float">
            <text:p>1</text:p>
          </table:table-cell>
          <table:table-cell office:value-type="string" calcext:value-type="string">
            <text:p>マリョク</text:p>
          </table:table-cell>
          <table:table-cell table:formula="of:=VLOOKUP([.K227];[$種類番号.$A$1:$種類番号.$B$4];2;0)" office:value-type="float" office:value="4" calcext:value-type="float">
            <text:p>4</text:p>
          </table:table-cell>
          <table:table-cell office:value-type="string" calcext:value-type="string">
            <text:p>紫</text:p>
          </table:table-cell>
          <table:table-cell table:formula="of:=VLOOKUP([.M227];[$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7];[$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自分の魔力ゾーンのマリョク1つにつき「パワー+500」を得る。</text:p>
          </table:table-cell>
          <table:table-cell table:style-name="ce8" office:value-type="string" calcext:value-type="string">
            <text:p>復元</text:p>
          </table:table-cell>
          <table:table-cell table:formula="of:=IFERROR(VLOOKUP([.$V227];[$遺業能力番号.$A$1:$遺業能力番号.$B$9];2;0);0)" office:value-type="float" office:value="3" calcext:value-type="float">
            <text:p>3</text:p>
          </table:table-cell>
          <table:table-cell office:value-type="string" calcext:value-type="string">
            <text:p>https://one-draw.jp/ijinden/cardlist/P01/card/03_P_014.png</text:p>
          </table:table-cell>
          <table:table-cell table:formula="of:=CONCATENATE([$JSON.$A$1];[.$C227];[$JSON.$B$1];[.$E227];[$JSON.$C$1];[.$F227];[$JSON.$D$1];IF(ISNA([.$S227]);&quot;null&quot;;&quot;&quot;&quot;&quot;&amp;[.$S227]&amp;&quot;&quot;&quot;&quot;);[$JSON.$E$1];[.$U227];[$JSON.$F$1];IF(ISNA([.$V227]);&quot;null&quot;;&quot;&quot;&quot;&quot;&amp;[.$V227]&amp;&quot;&quot;&quot;&quot;);[$JSON.$G$1];[.$X227];[$JSON.$H$1];[.$H227];[$JSON.$I$1];[.J227];[$JSON.$J$1];[.$L227];[$JSON.$K$1];[.$O227];[$JSON.$L$1];[.$N227];[$JSON.$M$1];[.$R227];[$JSON.$N$1];[.$T227];[$JSON.$O$1];[.$W227];[$JSON.$P$1];[.$A227];[$JSON.$Q$1];[.$B227];[$JSON.$R$1])" office:value-type="string" office:string-value="{&quot;id&quot;:&quot;P-14&quot;,&quot;name&quot;:&quot;ブラックブレイド&quot;,&quot;kana&quot;:&quot;ぶらっくぶれいど&quot;,&quot;traitText&quot;:null,&quot;ruleText&quot;:&quot;イジン召喚によってイジンが自分の戦場に置かれる際、そのイジンに装備させてもよい。¶装備 : 自分の魔力ゾーンのマリョク1つにつき「パワー+500」を得る。&quot;,&quot;legacyText&quot;:&quot;復元&quot;,&quot;imageUrl&quot;:&quot;https://one-draw.jp/ijinden/cardlist/P01/card/03_P_014.png&quot;,&quot;expansion&quot;:30,&quot;rarity&quot;:1,&quot;type&quot;:4,&quot;level&quot;:1,&quot;color&quot;:16,&quot;term&quot;:0,&quot;trait&quot;:0,&quot;legacy&quot;:3,&quot;orderTable&quot;:226,&quot;orderDeck&quot;:367}," calcext:value-type="string">
            <text:p>{"id":"P-14","name":"ブラックブレイド","kana":"ぶらっくぶれいど","traitText":null,"ruleText":"イジン召喚によってイジンが自分の戦場に置かれる際、そのイジンに装備させてもよい。¶装備 : 自分の魔力ゾーンのマリョク1つにつき「パワー+500」を得る。","legacyText":"復元","imageUrl":"https://one-draw.jp/ijinden/cardlist/P01/card/03_P_014.png","expansion":30,"rarity":1,"type":4,"level":1,"color":16,"term":0,"trait":0,"legacy":3,"orderTable":226,"orderDeck":367},</text:p>
          </table:table-cell>
          <table:table-cell table:number-columns-repeated="16347"/>
        </table:table-row>
        <table:table-row table:style-name="ro2">
          <table:table-cell office:value-type="float" office:value="227" calcext:value-type="float">
            <text:p>227</text:p>
          </table:table-cell>
          <table:table-cell office:value-type="float" office:value="383" calcext:value-type="float">
            <text:p>383</text:p>
          </table:table-cell>
          <table:table-cell office:value-type="string" calcext:value-type="string">
            <text:p>P-15</text:p>
          </table:table-cell>
          <table:table-cell office:value-type="float" office:value="15" calcext:value-type="float">
            <text:p>15</text:p>
          </table:table-cell>
          <table:table-cell office:value-type="string" calcext:value-type="string">
            <text:p>パープルオーブ</text:p>
          </table:table-cell>
          <table:table-cell office:value-type="string" calcext:value-type="string">
            <text:p>ぱーぷるおーぶ</text:p>
          </table:table-cell>
          <table:table-cell office:value-type="string" calcext:value-type="string">
            <text:p>発展する医療デッキ</text:p>
          </table:table-cell>
          <table:table-cell table:formula="of:=VLOOKUP([.G228];[$収録番号.$A$1:$収録番号.$B$9];2;0)" office:value-type="float" office:value="30" calcext:value-type="float">
            <text:p>30</text:p>
          </table:table-cell>
          <table:table-cell office:value-type="string" calcext:value-type="string">
            <text:p>N</text:p>
          </table:table-cell>
          <table:table-cell table:formula="of:=VLOOKUP([.I228];[$レアリティ番号.$A$1:$レアリティ番号.$B$4];2;0)" office:value-type="float" office:value="1" calcext:value-type="float">
            <text:p>1</text:p>
          </table:table-cell>
          <table:table-cell office:value-type="string" calcext:value-type="string">
            <text:p>マリョク</text:p>
          </table:table-cell>
          <table:table-cell table:formula="of:=VLOOKUP([.K228];[$種類番号.$A$1:$種類番号.$B$4];2;0)" office:value-type="float" office:value="4" calcext:value-type="float">
            <text:p>4</text:p>
          </table:table-cell>
          <table:table-cell office:value-type="string" calcext:value-type="string">
            <text:p>紫</text:p>
          </table:table-cell>
          <table:table-cell table:formula="of:=VLOOKUP([.M228];[$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8];[$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V228];[$遺業能力番号.$A$1:$遺業能力番号.$B$9];2;0);0)" office:value-type="float" office:value="3" calcext:value-type="float">
            <text:p>3</text:p>
          </table:table-cell>
          <table:table-cell office:value-type="string" calcext:value-type="string">
            <text:p>https://one-draw.jp/ijinden/cardlist/P01/card/03_P_015.png</text:p>
          </table:table-cell>
          <table:table-cell table:formula="of:=CONCATENATE([$JSON.$A$1];[.$C228];[$JSON.$B$1];[.$E228];[$JSON.$C$1];[.$F228];[$JSON.$D$1];IF(ISNA([.$S228]);&quot;null&quot;;&quot;&quot;&quot;&quot;&amp;[.$S228]&amp;&quot;&quot;&quot;&quot;);[$JSON.$E$1];[.$U228];[$JSON.$F$1];IF(ISNA([.$V228]);&quot;null&quot;;&quot;&quot;&quot;&quot;&amp;[.$V228]&amp;&quot;&quot;&quot;&quot;);[$JSON.$G$1];[.$X228];[$JSON.$H$1];[.$H228];[$JSON.$I$1];[.J228];[$JSON.$J$1];[.$L228];[$JSON.$K$1];[.$O228];[$JSON.$L$1];[.$N228];[$JSON.$M$1];[.$R228];[$JSON.$N$1];[.$T228];[$JSON.$O$1];[.$W228];[$JSON.$P$1];[.$A228];[$JSON.$Q$1];[.$B228];[$JSON.$R$1])" office:value-type="string" office:string-value="{&quot;id&quot;:&quot;P-15&quot;,&quot;name&quot;:&quot;パープルオーブ&quot;,&quot;kana&quot;:&quot;ぱーぷるおーぶ&quot;,&quot;traitText&quot;:null,&quot;ruleText&quot;:&quot;&quot;,&quot;legacyText&quot;:&quot;復元&quot;,&quot;imageUrl&quot;:&quot;https://one-draw.jp/ijinden/cardlist/P01/card/03_P_015.png&quot;,&quot;expansion&quot;:30,&quot;rarity&quot;:1,&quot;type&quot;:4,&quot;level&quot;:2,&quot;color&quot;:16,&quot;term&quot;:0,&quot;trait&quot;:0,&quot;legacy&quot;:3,&quot;orderTable&quot;:227,&quot;orderDeck&quot;:383}," calcext:value-type="string">
            <text:p>{"id":"P-15","name":"パープルオーブ","kana":"ぱーぷるおーぶ","traitText":null,"ruleText":"","legacyText":"復元","imageUrl":"https://one-draw.jp/ijinden/cardlist/P01/card/03_P_015.png","expansion":30,"rarity":1,"type":4,"level":2,"color":16,"term":0,"trait":0,"legacy":3,"orderTable":227,"orderDeck":383},</text:p>
          </table:table-cell>
          <table:table-cell table:number-columns-repeated="16347"/>
        </table:table-row>
        <table:table-row table:style-name="ro2">
          <table:table-cell office:value-type="float" office:value="228" calcext:value-type="float">
            <text:p>228</text:p>
          </table:table-cell>
          <table:table-cell office:value-type="float" office:value="368" calcext:value-type="float">
            <text:p>368</text:p>
          </table:table-cell>
          <table:table-cell office:value-type="string" calcext:value-type="string">
            <text:p>P-16</text:p>
          </table:table-cell>
          <table:table-cell office:value-type="float" office:value="16" calcext:value-type="float">
            <text:p>16</text:p>
          </table:table-cell>
          <table:table-cell office:value-type="string" calcext:value-type="string">
            <text:p>パープルストーン</text:p>
          </table:table-cell>
          <table:table-cell office:value-type="string" calcext:value-type="string">
            <text:p>ぱーぷるすとーん</text:p>
          </table:table-cell>
          <table:table-cell office:value-type="string" calcext:value-type="string">
            <text:p>発展する医療デッキ</text:p>
          </table:table-cell>
          <table:table-cell table:formula="of:=VLOOKUP([.G229];[$収録番号.$A$1:$収録番号.$B$9];2;0)" office:value-type="float" office:value="30" calcext:value-type="float">
            <text:p>30</text:p>
          </table:table-cell>
          <table:table-cell office:value-type="string" calcext:value-type="string">
            <text:p>N</text:p>
          </table:table-cell>
          <table:table-cell table:formula="of:=VLOOKUP([.I229];[$レアリティ番号.$A$1:$レアリティ番号.$B$4];2;0)" office:value-type="float" office:value="1" calcext:value-type="float">
            <text:p>1</text:p>
          </table:table-cell>
          <table:table-cell office:value-type="string" calcext:value-type="string">
            <text:p>マリョク</text:p>
          </table:table-cell>
          <table:table-cell table:formula="of:=VLOOKUP([.K229];[$種類番号.$A$1:$種類番号.$B$4];2;0)" office:value-type="float" office:value="4" calcext:value-type="float">
            <text:p>4</text:p>
          </table:table-cell>
          <table:table-cell office:value-type="string" calcext:value-type="string">
            <text:p>紫</text:p>
          </table:table-cell>
          <table:table-cell table:formula="of:=VLOOKUP([.M229];[$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9];[$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V229];[$遺業能力番号.$A$1:$遺業能力番号.$B$9];2;0);0)" office:value-type="float" office:value="3" calcext:value-type="float">
            <text:p>3</text:p>
          </table:table-cell>
          <table:table-cell office:value-type="string" calcext:value-type="string">
            <text:p>https://one-draw.jp/ijinden/cardlist/P01/card/03_P_016.png</text:p>
          </table:table-cell>
          <table:table-cell table:formula="of:=CONCATENATE([$JSON.$A$1];[.$C229];[$JSON.$B$1];[.$E229];[$JSON.$C$1];[.$F229];[$JSON.$D$1];IF(ISNA([.$S229]);&quot;null&quot;;&quot;&quot;&quot;&quot;&amp;[.$S229]&amp;&quot;&quot;&quot;&quot;);[$JSON.$E$1];[.$U229];[$JSON.$F$1];IF(ISNA([.$V229]);&quot;null&quot;;&quot;&quot;&quot;&quot;&amp;[.$V229]&amp;&quot;&quot;&quot;&quot;);[$JSON.$G$1];[.$X229];[$JSON.$H$1];[.$H229];[$JSON.$I$1];[.J229];[$JSON.$J$1];[.$L229];[$JSON.$K$1];[.$O229];[$JSON.$L$1];[.$N229];[$JSON.$M$1];[.$R229];[$JSON.$N$1];[.$T229];[$JSON.$O$1];[.$W229];[$JSON.$P$1];[.$A229];[$JSON.$Q$1];[.$B229];[$JSON.$R$1])" office:value-type="string" office:string-value="{&quot;id&quot;:&quot;P-16&quot;,&quot;name&quot;:&quot;パープルストーン&quot;,&quot;kana&quot;:&quot;ぱーぷるすとーん&quot;,&quot;traitText&quot;:null,&quot;ruleText&quot;:&quot;※デッキに何枚でも入れてよい。&quot;,&quot;legacyText&quot;:&quot;復元&quot;,&quot;imageUrl&quot;:&quot;https://one-draw.jp/ijinden/cardlist/P01/card/03_P_016.png&quot;,&quot;expansion&quot;:30,&quot;rarity&quot;:1,&quot;type&quot;:4,&quot;level&quot;:1,&quot;color&quot;:16,&quot;term&quot;:0,&quot;trait&quot;:0,&quot;legacy&quot;:3,&quot;orderTable&quot;:228,&quot;orderDeck&quot;:368}," calcext:value-type="string">
            <text:p>{"id":"P-16","name":"パープルストーン","kana":"ぱーぷるすとーん","traitText":null,"ruleText":"※デッキに何枚でも入れてよい。","legacyText":"復元","imageUrl":"https://one-draw.jp/ijinden/cardlist/P01/card/03_P_016.png","expansion":30,"rarity":1,"type":4,"level":1,"color":16,"term":0,"trait":0,"legacy":3,"orderTable":228,"orderDeck":368},</text:p>
          </table:table-cell>
          <table:table-cell table:number-columns-repeated="16347"/>
        </table:table-row>
        <table:table-row table:style-name="ro2">
          <table:table-cell office:value-type="float" office:value="229" calcext:value-type="float">
            <text:p>229</text:p>
          </table:table-cell>
          <table:table-cell office:value-type="float" office:value="150" calcext:value-type="float">
            <text:p>150</text:p>
          </table:table-cell>
          <table:table-cell office:value-type="string" calcext:value-type="string">
            <text:p>3-1</text:p>
          </table:table-cell>
          <table:table-cell office:value-type="float" office:value="1" calcext:value-type="float">
            <text:p>1</text:p>
          </table:table-cell>
          <table:table-cell office:value-type="string" calcext:value-type="string">
            <text:p>宮本武蔵</text:p>
          </table:table-cell>
          <table:table-cell office:value-type="string" calcext:value-type="string">
            <text:p>みやもとむさし</text:p>
          </table:table-cell>
          <table:table-cell office:value-type="string" calcext:value-type="string">
            <text:p>第３弾ブースターパック</text:p>
          </table:table-cell>
          <table:table-cell table:formula="of:=VLOOKUP([.G230];[$収録番号.$A$1:$収録番号.$B$9];2;0)" office:value-type="float" office:value="35" calcext:value-type="float">
            <text:p>35</text:p>
          </table:table-cell>
          <table:table-cell office:value-type="string" calcext:value-type="string">
            <text:p>SR</text:p>
          </table:table-cell>
          <table:table-cell table:formula="of:=VLOOKUP([.I230];[$レアリティ番号.$A$1:$レアリティ番号.$B$4];2;0)" office:value-type="float" office:value="4" calcext:value-type="float">
            <text:p>4</text:p>
          </table:table-cell>
          <table:table-cell office:value-type="string" calcext:value-type="string">
            <text:p>イジン</text:p>
          </table:table-cell>
          <table:table-cell table:formula="of:=VLOOKUP([.K230];[$種類番号.$A$1:$種類番号.$B$4];2;0)" office:value-type="float" office:value="1" calcext:value-type="float">
            <text:p>1</text:p>
          </table:table-cell>
          <table:table-cell office:value-type="string" calcext:value-type="string">
            <text:p>赤</text:p>
          </table:table-cell>
          <table:table-cell table:formula="of:=VLOOKUP([.M230];[$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0];[$能力語番号.$A$1:$能力語番号.$B$10];2;0);0)" office:value-type="float" office:value="0" calcext:value-type="float">
            <text:p>0</text:p>
          </table:table-cell>
          <table:table-cell office:value-type="string" calcext:value-type="string">
            <text:p>剣術</text:p>
          </table:table-cell>
          <table:table-cell table:formula="of:=IFERROR(VLOOKUP([.$S230];[$特性番号.$A$1:$特性番号.$B$8];2;0);0)" office:value-type="float" office:value="1" calcext:value-type="float">
            <text:p>1</text:p>
          </table:table-cell>
          <table:table-cell office:value-type="string" calcext:value-type="string">
            <text:p>カードを2つ以上装備している間「ダブルプレッシャー アタック+4000」を得る。¶戦場に「剣術」イジンが置かれたとき、パワー2000以下の相手の戦場のイジン1体を破壊する。</text:p>
          </table:table-cell>
          <table:table-cell table:style-name="ce8" table:formula="of:=NA()" office:value-type="string" office:string-value="" calcext:value-type="error">
            <text:p>#N/A</text:p>
          </table:table-cell>
          <table:table-cell table:formula="of:=IFERROR(VLOOKUP([.$V230];[$遺業能力番号.$A$1:$遺業能力番号.$B$9];2;0);0)" office:value-type="float" office:value="0" calcext:value-type="float">
            <text:p>0</text:p>
          </table:table-cell>
          <table:table-cell office:value-type="string" calcext:value-type="string">
            <text:p>https://one-draw.jp/ijinden/cardlist/003/card/03_001.png</text:p>
          </table:table-cell>
          <table:table-cell table:formula="of:=CONCATENATE([$JSON.$A$1];[.$C230];[$JSON.$B$1];[.$E230];[$JSON.$C$1];[.$F230];[$JSON.$D$1];IF(ISNA([.$S230]);&quot;null&quot;;&quot;&quot;&quot;&quot;&amp;[.$S230]&amp;&quot;&quot;&quot;&quot;);[$JSON.$E$1];[.$U230];[$JSON.$F$1];IF(ISNA([.$V230]);&quot;null&quot;;&quot;&quot;&quot;&quot;&amp;[.$V230]&amp;&quot;&quot;&quot;&quot;);[$JSON.$G$1];[.$X230];[$JSON.$H$1];[.$H230];[$JSON.$I$1];[.J230];[$JSON.$J$1];[.$L230];[$JSON.$K$1];[.$O230];[$JSON.$L$1];[.$N230];[$JSON.$M$1];[.$R230];[$JSON.$N$1];[.$T230];[$JSON.$O$1];[.$W230];[$JSON.$P$1];[.$A230];[$JSON.$Q$1];[.$B230];[$JSON.$R$1])" office:value-type="string" office:string-value="{&quot;id&quot;:&quot;3-1&quot;,&quot;name&quot;:&quot;宮本武蔵&quot;,&quot;kana&quot;:&quot;みやもとむさし&quot;,&quot;traitText&quot;:&quot;剣術&quot;,&quot;ruleText&quot;:&quot;カードを2つ以上装備している間「ダブルプレッシャー アタック+4000」を得る。¶戦場に「剣術」イジンが置かれたとき、パワー2000以下の相手の戦場のイジン1体を破壊する。&quot;,&quot;legacyText&quot;:null,&quot;imageUrl&quot;:&quot;https://one-draw.jp/ijinden/cardlist/003/card/03_001.png&quot;,&quot;expansion&quot;:35,&quot;rarity&quot;:4,&quot;type&quot;:1,&quot;level&quot;:5,&quot;color&quot;:1,&quot;term&quot;:0,&quot;trait&quot;:1,&quot;legacy&quot;:0,&quot;orderTable&quot;:229,&quot;orderDeck&quot;:150}," calcext:value-type="string">
            <text:p>{"id":"3-1","name":"宮本武蔵","kana":"みやもとむさし","traitText":"剣術","ruleText":"カードを2つ以上装備している間「ダブルプレッシャー アタック+4000」を得る。¶戦場に「剣術」イジンが置かれたとき、パワー2000以下の相手の戦場のイジン1体を破壊する。","legacyText":null,"imageUrl":"https://one-draw.jp/ijinden/cardlist/003/card/03_001.png","expansion":35,"rarity":4,"type":1,"level":5,"color":1,"term":0,"trait":1,"legacy":0,"orderTable":229,"orderDeck":150},</text:p>
          </table:table-cell>
          <table:table-cell table:number-columns-repeated="16347"/>
        </table:table-row>
        <table:table-row table:style-name="ro2">
          <table:table-cell office:value-type="float" office:value="230" calcext:value-type="float">
            <text:p>230</text:p>
          </table:table-cell>
          <table:table-cell office:value-type="float" office:value="111" calcext:value-type="float">
            <text:p>111</text:p>
          </table:table-cell>
          <table:table-cell office:value-type="string" calcext:value-type="string">
            <text:p>3-2</text:p>
          </table:table-cell>
          <table:table-cell office:value-type="float" office:value="2" calcext:value-type="float">
            <text:p>2</text:p>
          </table:table-cell>
          <table:table-cell office:value-type="string" calcext:value-type="string">
            <text:p>エリザベス1世</text:p>
          </table:table-cell>
          <table:table-cell office:value-type="string" calcext:value-type="string">
            <text:p>えりざべすいっせい</text:p>
          </table:table-cell>
          <table:table-cell office:value-type="string" calcext:value-type="string">
            <text:p>第３弾ブースターパック</text:p>
          </table:table-cell>
          <table:table-cell table:formula="of:=VLOOKUP([.G231];[$収録番号.$A$1:$収録番号.$B$9];2;0)" office:value-type="float" office:value="35" calcext:value-type="float">
            <text:p>35</text:p>
          </table:table-cell>
          <table:table-cell office:value-type="string" calcext:value-type="string">
            <text:p>SR</text:p>
          </table:table-cell>
          <table:table-cell table:formula="of:=VLOOKUP([.I231];[$レアリティ番号.$A$1:$レアリティ番号.$B$4];2;0)" office:value-type="float" office:value="4" calcext:value-type="float">
            <text:p>4</text:p>
          </table:table-cell>
          <table:table-cell office:value-type="string" calcext:value-type="string">
            <text:p>イジン</text:p>
          </table:table-cell>
          <table:table-cell table:formula="of:=VLOOKUP([.K231];[$種類番号.$A$1:$種類番号.$B$4];2;0)" office:value-type="float" office:value="1" calcext:value-type="float">
            <text:p>1</text:p>
          </table:table-cell>
          <table:table-cell office:value-type="string" calcext:value-type="string">
            <text:p>赤</text:p>
          </table:table-cell>
          <table:table-cell table:formula="of:=VLOOKUP([.M231];[$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31];[$特性番号.$A$1:$特性番号.$B$8];2;0);0)" office:value-type="float" office:value="0" calcext:value-type="float">
            <text:p>0</text:p>
          </table:table-cell>
          <table:table-cell office:value-type="string" calcext:value-type="string">
            <text:p>能力によってカードが自分の魔力ゾーンを離れるたび、相手の戦場のパワー3000以下のイジン1体を破壊する。¶この能力はターンに1回しか発動しない。カードが裏向きで自分の魔力ゾーンに置かれたとき、1ドローする。</text:p>
          </table:table-cell>
          <table:table-cell table:style-name="ce8" office:value-type="string" calcext:value-type="string">
            <text:p>反魂</text:p>
          </table:table-cell>
          <table:table-cell table:formula="of:=IFERROR(VLOOKUP([.$V231];[$遺業能力番号.$A$1:$遺業能力番号.$B$9];2;0);0)" office:value-type="float" office:value="6" calcext:value-type="float">
            <text:p>6</text:p>
          </table:table-cell>
          <table:table-cell office:value-type="string" calcext:value-type="string">
            <text:p>https://one-draw.jp/ijinden/cardlist/003/card/03_002.png</text:p>
          </table:table-cell>
          <table:table-cell table:formula="of:=CONCATENATE([$JSON.$A$1];[.$C231];[$JSON.$B$1];[.$E231];[$JSON.$C$1];[.$F231];[$JSON.$D$1];IF(ISNA([.$S231]);&quot;null&quot;;&quot;&quot;&quot;&quot;&amp;[.$S231]&amp;&quot;&quot;&quot;&quot;);[$JSON.$E$1];[.$U231];[$JSON.$F$1];IF(ISNA([.$V231]);&quot;null&quot;;&quot;&quot;&quot;&quot;&amp;[.$V231]&amp;&quot;&quot;&quot;&quot;);[$JSON.$G$1];[.$X231];[$JSON.$H$1];[.$H231];[$JSON.$I$1];[.J231];[$JSON.$J$1];[.$L231];[$JSON.$K$1];[.$O231];[$JSON.$L$1];[.$N231];[$JSON.$M$1];[.$R231];[$JSON.$N$1];[.$T231];[$JSON.$O$1];[.$W231];[$JSON.$P$1];[.$A231];[$JSON.$Q$1];[.$B231];[$JSON.$R$1])" office:value-type="string" office:string-value="{&quot;id&quot;:&quot;3-2&quot;,&quot;name&quot;:&quot;エリザベス1世&quot;,&quot;kana&quot;:&quot;えりざべすいっせい&quot;,&quot;traitText&quot;:null,&quot;ruleText&quot;:&quot;能力によってカードが自分の魔力ゾーンを離れるたび、相手の戦場のパワー3000以下のイジン1体を破壊する。¶この能力はターンに1回しか発動しない。カードが裏向きで自分の魔力ゾーンに置かれたとき、1ドローする。&quot;,&quot;legacyText&quot;:&quot;反魂&quot;,&quot;imageUrl&quot;:&quot;https://one-draw.jp/ijinden/cardlist/003/card/03_002.png&quot;,&quot;expansion&quot;:35,&quot;rarity&quot;:4,&quot;type&quot;:1,&quot;level&quot;:4,&quot;color&quot;:1,&quot;term&quot;:0,&quot;trait&quot;:0,&quot;legacy&quot;:6,&quot;orderTable&quot;:230,&quot;orderDeck&quot;:111}," calcext:value-type="string">
            <text:p>{"id":"3-2","name":"エリザベス1世","kana":"えりざべすいっせい","traitText":null,"ruleText":"能力によってカードが自分の魔力ゾーンを離れるたび、相手の戦場のパワー3000以下のイジン1体を破壊する。¶この能力はターンに1回しか発動しない。カードが裏向きで自分の魔力ゾーンに置かれたとき、1ドローする。","legacyText":"反魂","imageUrl":"https://one-draw.jp/ijinden/cardlist/003/card/03_002.png","expansion":35,"rarity":4,"type":1,"level":4,"color":1,"term":0,"trait":0,"legacy":6,"orderTable":230,"orderDeck":111},</text:p>
          </table:table-cell>
          <table:table-cell table:number-columns-repeated="16347"/>
        </table:table-row>
        <table:table-row table:style-name="ro2">
          <table:table-cell office:value-type="float" office:value="231" calcext:value-type="float">
            <text:p>231</text:p>
          </table:table-cell>
          <table:table-cell office:value-type="float" office:value="206" calcext:value-type="float">
            <text:p>206</text:p>
          </table:table-cell>
          <table:table-cell office:value-type="string" calcext:value-type="string">
            <text:p>3-3</text:p>
          </table:table-cell>
          <table:table-cell office:value-type="float" office:value="3" calcext:value-type="float">
            <text:p>3</text:p>
          </table:table-cell>
          <table:table-cell office:value-type="string" calcext:value-type="string">
            <text:p>エンリケ航海王子</text:p>
          </table:table-cell>
          <table:table-cell office:value-type="string" calcext:value-type="string">
            <text:p>えんりけこうかいおうじ</text:p>
          </table:table-cell>
          <table:table-cell office:value-type="string" calcext:value-type="string">
            <text:p>第３弾ブースターパック</text:p>
          </table:table-cell>
          <table:table-cell table:formula="of:=VLOOKUP([.G232];[$収録番号.$A$1:$収録番号.$B$9];2;0)" office:value-type="float" office:value="35" calcext:value-type="float">
            <text:p>35</text:p>
          </table:table-cell>
          <table:table-cell office:value-type="string" calcext:value-type="string">
            <text:p>SR</text:p>
          </table:table-cell>
          <table:table-cell table:formula="of:=VLOOKUP([.I232];[$レアリティ番号.$A$1:$レアリティ番号.$B$4];2;0)" office:value-type="float" office:value="4" calcext:value-type="float">
            <text:p>4</text:p>
          </table:table-cell>
          <table:table-cell office:value-type="string" calcext:value-type="string">
            <text:p>イジン</text:p>
          </table:table-cell>
          <table:table-cell table:formula="of:=VLOOKUP([.K232];[$種類番号.$A$1:$種類番号.$B$4];2;0)" office:value-type="float" office:value="1" calcext:value-type="float">
            <text:p>1</text:p>
          </table:table-cell>
          <table:table-cell office:value-type="string" calcext:value-type="string">
            <text:p>青</text:p>
          </table:table-cell>
          <table:table-cell table:formula="of:=VLOOKUP([.M232];[$色番号.$A$1:$色番号.$B$10];2;0)" office:value-type="float" office:value="2" calcext:value-type="float">
            <text:p>2</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32];[$特性番号.$A$1:$特性番号.$B$8];2;0);0)" office:value-type="float" office:value="0" calcext:value-type="float">
            <text:p>0</text:p>
          </table:table-cell>
          <table:table-cell office:value-type="string" calcext:value-type="string">
            <text:p>自分のメインフェイズが開始したとき、自分の魔力ゾーンのマリョク1つを墓地に置いて発動できる。このターンに限り「これが戦場にいる間、自分の戦場の「航海」は、戦場に置かれたときでも発動する」を得る。</text:p>
          </table:table-cell>
          <table:table-cell table:style-name="ce8" office:value-type="string" calcext:value-type="string">
            <text:p>1ドローする</text:p>
          </table:table-cell>
          <table:table-cell table:formula="of:=IFERROR(VLOOKUP([.$V232];[$遺業能力番号.$A$1:$遺業能力番号.$B$9];2;0);0)" office:value-type="float" office:value="4" calcext:value-type="float">
            <text:p>4</text:p>
          </table:table-cell>
          <table:table-cell office:value-type="string" calcext:value-type="string">
            <text:p>https://one-draw.jp/ijinden/cardlist/003/card/03_003.png</text:p>
          </table:table-cell>
          <table:table-cell table:formula="of:=CONCATENATE([$JSON.$A$1];[.$C232];[$JSON.$B$1];[.$E232];[$JSON.$C$1];[.$F232];[$JSON.$D$1];IF(ISNA([.$S232]);&quot;null&quot;;&quot;&quot;&quot;&quot;&amp;[.$S232]&amp;&quot;&quot;&quot;&quot;);[$JSON.$E$1];[.$U232];[$JSON.$F$1];IF(ISNA([.$V232]);&quot;null&quot;;&quot;&quot;&quot;&quot;&amp;[.$V232]&amp;&quot;&quot;&quot;&quot;);[$JSON.$G$1];[.$X232];[$JSON.$H$1];[.$H232];[$JSON.$I$1];[.J232];[$JSON.$J$1];[.$L232];[$JSON.$K$1];[.$O232];[$JSON.$L$1];[.$N232];[$JSON.$M$1];[.$R232];[$JSON.$N$1];[.$T232];[$JSON.$O$1];[.$W232];[$JSON.$P$1];[.$A232];[$JSON.$Q$1];[.$B232];[$JSON.$R$1])" office:value-type="string" office:string-value="{&quot;id&quot;:&quot;3-3&quot;,&quot;name&quot;:&quot;エンリケ航海王子&quot;,&quot;kana&quot;:&quot;えんりけこうかいおうじ&quot;,&quot;traitText&quot;:null,&quot;ruleText&quot;:&quot;自分のメインフェイズが開始したとき、自分の魔力ゾーンのマリョク1つを墓地に置いて発動できる。このターンに限り「これが戦場にいる間、自分の戦場の「航海」は、戦場に置かれたときでも発動する」を得る。&quot;,&quot;legacyText&quot;:&quot;1ドローする&quot;,&quot;imageUrl&quot;:&quot;https://one-draw.jp/ijinden/cardlist/003/card/03_003.png&quot;,&quot;expansion&quot;:35,&quot;rarity&quot;:4,&quot;type&quot;:1,&quot;level&quot;:7,&quot;color&quot;:2,&quot;term&quot;:0,&quot;trait&quot;:0,&quot;legacy&quot;:4,&quot;orderTable&quot;:231,&quot;orderDeck&quot;:206}," calcext:value-type="string">
            <text:p>{"id":"3-3","name":"エンリケ航海王子","kana":"えんりけこうかいおうじ","traitText":null,"ruleText":"自分のメインフェイズが開始したとき、自分の魔力ゾーンのマリョク1つを墓地に置いて発動できる。このターンに限り「これが戦場にいる間、自分の戦場の「航海」は、戦場に置かれたときでも発動する」を得る。","legacyText":"1ドローする","imageUrl":"https://one-draw.jp/ijinden/cardlist/003/card/03_003.png","expansion":35,"rarity":4,"type":1,"level":7,"color":2,"term":0,"trait":0,"legacy":4,"orderTable":231,"orderDeck":206},</text:p>
          </table:table-cell>
          <table:table-cell table:number-columns-repeated="16347"/>
        </table:table-row>
        <table:table-row table:style-name="ro2">
          <table:table-cell office:value-type="float" office:value="232" calcext:value-type="float">
            <text:p>232</text:p>
          </table:table-cell>
          <table:table-cell office:value-type="float" office:value="160" calcext:value-type="float">
            <text:p>160</text:p>
          </table:table-cell>
          <table:table-cell office:value-type="string" calcext:value-type="string">
            <text:p>3-4</text:p>
          </table:table-cell>
          <table:table-cell office:value-type="float" office:value="4" calcext:value-type="float">
            <text:p>4</text:p>
          </table:table-cell>
          <table:table-cell office:value-type="string" calcext:value-type="string">
            <text:p>吉田松陰</text:p>
          </table:table-cell>
          <table:table-cell office:value-type="string" calcext:value-type="string">
            <text:p>よしだしょういん</text:p>
          </table:table-cell>
          <table:table-cell office:value-type="string" calcext:value-type="string">
            <text:p>第３弾ブースターパック</text:p>
          </table:table-cell>
          <table:table-cell table:formula="of:=VLOOKUP([.G233];[$収録番号.$A$1:$収録番号.$B$9];2;0)" office:value-type="float" office:value="35" calcext:value-type="float">
            <text:p>35</text:p>
          </table:table-cell>
          <table:table-cell office:value-type="string" calcext:value-type="string">
            <text:p>SR</text:p>
          </table:table-cell>
          <table:table-cell table:formula="of:=VLOOKUP([.I233];[$レアリティ番号.$A$1:$レアリティ番号.$B$4];2;0)" office:value-type="float" office:value="4" calcext:value-type="float">
            <text:p>4</text:p>
          </table:table-cell>
          <table:table-cell office:value-type="string" calcext:value-type="string">
            <text:p>イジン</text:p>
          </table:table-cell>
          <table:table-cell table:formula="of:=VLOOKUP([.K233];[$種類番号.$A$1:$種類番号.$B$4];2;0)" office:value-type="float" office:value="1" calcext:value-type="float">
            <text:p>1</text:p>
          </table:table-cell>
          <table:table-cell office:value-type="string" calcext:value-type="string">
            <text:p>青</text:p>
          </table:table-cell>
          <table:table-cell table:formula="of:=VLOOKUP([.M233];[$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3];[$能力語番号.$A$1:$能力語番号.$B$10];2;0);0)" office:value-type="float" office:value="0" calcext:value-type="float">
            <text:p>0</text:p>
          </table:table-cell>
          <table:table-cell office:value-type="string" calcext:value-type="string">
            <text:p>思想</text:p>
          </table:table-cell>
          <table:table-cell table:formula="of:=IFERROR(VLOOKUP([.$S233];[$特性番号.$A$1:$特性番号.$B$8];2;0);0)" office:value-type="float" office:value="8" calcext:value-type="float">
            <text:p>8</text:p>
          </table:table-cell>
          <table:table-cell office:value-type="string" calcext:value-type="string">
            <text:p>これが戦場にいる間「決起」は発動しない。¶起きているイジンが相手の戦場にいる間、自分の戦場の「思想」イジンは「ダブルプレッシャー」を得る</text:p>
          </table:table-cell>
          <table:table-cell table:style-name="ce8" office:value-type="string" calcext:value-type="string">
            <text:p>1ドローする</text:p>
          </table:table-cell>
          <table:table-cell table:formula="of:=IFERROR(VLOOKUP([.$V233];[$遺業能力番号.$A$1:$遺業能力番号.$B$9];2;0);0)" office:value-type="float" office:value="4" calcext:value-type="float">
            <text:p>4</text:p>
          </table:table-cell>
          <table:table-cell office:value-type="string" calcext:value-type="string">
            <text:p>https://one-draw.jp/ijinden/cardlist/003/card/03_004.png</text:p>
          </table:table-cell>
          <table:table-cell table:formula="of:=CONCATENATE([$JSON.$A$1];[.$C233];[$JSON.$B$1];[.$E233];[$JSON.$C$1];[.$F233];[$JSON.$D$1];IF(ISNA([.$S233]);&quot;null&quot;;&quot;&quot;&quot;&quot;&amp;[.$S233]&amp;&quot;&quot;&quot;&quot;);[$JSON.$E$1];[.$U233];[$JSON.$F$1];IF(ISNA([.$V233]);&quot;null&quot;;&quot;&quot;&quot;&quot;&amp;[.$V233]&amp;&quot;&quot;&quot;&quot;);[$JSON.$G$1];[.$X233];[$JSON.$H$1];[.$H233];[$JSON.$I$1];[.J233];[$JSON.$J$1];[.$L233];[$JSON.$K$1];[.$O233];[$JSON.$L$1];[.$N233];[$JSON.$M$1];[.$R233];[$JSON.$N$1];[.$T233];[$JSON.$O$1];[.$W233];[$JSON.$P$1];[.$A233];[$JSON.$Q$1];[.$B233];[$JSON.$R$1])" office:value-type="string" office:string-value="{&quot;id&quot;:&quot;3-4&quot;,&quot;name&quot;:&quot;吉田松陰&quot;,&quot;kana&quot;:&quot;よしだしょういん&quot;,&quot;traitText&quot;:&quot;思想&quot;,&quot;ruleText&quot;:&quot;これが戦場にいる間「決起」は発動しない。¶起きているイジンが相手の戦場にいる間、自分の戦場の「思想」イジンは「ダブルプレッシャー」を得る&quot;,&quot;legacyText&quot;:&quot;1ドローする&quot;,&quot;imageUrl&quot;:&quot;https://one-draw.jp/ijinden/cardlist/003/card/03_004.png&quot;,&quot;expansion&quot;:35,&quot;rarity&quot;:4,&quot;type&quot;:1,&quot;level&quot;:5,&quot;color&quot;:2,&quot;term&quot;:0,&quot;trait&quot;:8,&quot;legacy&quot;:4,&quot;orderTable&quot;:232,&quot;orderDeck&quot;:160}," calcext:value-type="string">
            <text:p>{"id":"3-4","name":"吉田松陰","kana":"よしだしょういん","traitText":"思想","ruleText":"これが戦場にいる間「決起」は発動しない。¶起きているイジンが相手の戦場にいる間、自分の戦場の「思想」イジンは「ダブルプレッシャー」を得る","legacyText":"1ドローする","imageUrl":"https://one-draw.jp/ijinden/cardlist/003/card/03_004.png","expansion":35,"rarity":4,"type":1,"level":5,"color":2,"term":0,"trait":8,"legacy":4,"orderTable":232,"orderDeck":160},</text:p>
          </table:table-cell>
          <table:table-cell table:number-columns-repeated="16347"/>
        </table:table-row>
        <table:table-row table:style-name="ro2">
          <table:table-cell office:value-type="float" office:value="233" calcext:value-type="float">
            <text:p>233</text:p>
          </table:table-cell>
          <table:table-cell office:value-type="float" office:value="169" calcext:value-type="float">
            <text:p>169</text:p>
          </table:table-cell>
          <table:table-cell office:value-type="string" calcext:value-type="string">
            <text:p>3-5</text:p>
          </table:table-cell>
          <table:table-cell office:value-type="float" office:value="5" calcext:value-type="float">
            <text:p>5</text:p>
          </table:table-cell>
          <table:table-cell office:value-type="string" calcext:value-type="string">
            <text:p>徳川光圀</text:p>
          </table:table-cell>
          <table:table-cell office:value-type="string" calcext:value-type="string">
            <text:p>とくがわみつくに</text:p>
          </table:table-cell>
          <table:table-cell office:value-type="string" calcext:value-type="string">
            <text:p>第３弾ブースターパック</text:p>
          </table:table-cell>
          <table:table-cell table:formula="of:=VLOOKUP([.G234];[$収録番号.$A$1:$収録番号.$B$9];2;0)" office:value-type="float" office:value="35" calcext:value-type="float">
            <text:p>35</text:p>
          </table:table-cell>
          <table:table-cell office:value-type="string" calcext:value-type="string">
            <text:p>SR</text:p>
          </table:table-cell>
          <table:table-cell table:formula="of:=VLOOKUP([.I234];[$レアリティ番号.$A$1:$レアリティ番号.$B$4];2;0)" office:value-type="float" office:value="4" calcext:value-type="float">
            <text:p>4</text:p>
          </table:table-cell>
          <table:table-cell office:value-type="string" calcext:value-type="string">
            <text:p>イジン</text:p>
          </table:table-cell>
          <table:table-cell table:formula="of:=VLOOKUP([.K234];[$種類番号.$A$1:$種類番号.$B$4];2;0)" office:value-type="float" office:value="1" calcext:value-type="float">
            <text:p>1</text:p>
          </table:table-cell>
          <table:table-cell office:value-type="string" calcext:value-type="string">
            <text:p>緑</text:p>
          </table:table-cell>
          <table:table-cell table:formula="of:=VLOOKUP([.M234];[$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34];[$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34];[$特性番号.$A$1:$特性番号.$B$8];2;0);0)" office:value-type="float" office:value="0" calcext:value-type="float">
            <text:p>0</text:p>
          </table:table-cell>
          <table:table-cell office:value-type="string" calcext:value-type="string">
            <text:p>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text:p>
          </table:table-cell>
          <table:table-cell table:style-name="ce8" office:value-type="string" calcext:value-type="string">
            <text:p>木霊</text:p>
          </table:table-cell>
          <table:table-cell table:formula="of:=IFERROR(VLOOKUP([.$V234];[$遺業能力番号.$A$1:$遺業能力番号.$B$9];2;0);0)" office:value-type="float" office:value="8" calcext:value-type="float">
            <text:p>8</text:p>
          </table:table-cell>
          <table:table-cell office:value-type="string" calcext:value-type="string">
            <text:p>https://one-draw.jp/ijinden/cardlist/003/card/03_005.png</text:p>
          </table:table-cell>
          <table:table-cell table:formula="of:=CONCATENATE([$JSON.$A$1];[.$C234];[$JSON.$B$1];[.$E234];[$JSON.$C$1];[.$F234];[$JSON.$D$1];IF(ISNA([.$S234]);&quot;null&quot;;&quot;&quot;&quot;&quot;&amp;[.$S234]&amp;&quot;&quot;&quot;&quot;);[$JSON.$E$1];[.$U234];[$JSON.$F$1];IF(ISNA([.$V234]);&quot;null&quot;;&quot;&quot;&quot;&quot;&amp;[.$V234]&amp;&quot;&quot;&quot;&quot;);[$JSON.$G$1];[.$X234];[$JSON.$H$1];[.$H234];[$JSON.$I$1];[.J234];[$JSON.$J$1];[.$L234];[$JSON.$K$1];[.$O234];[$JSON.$L$1];[.$N234];[$JSON.$M$1];[.$R234];[$JSON.$N$1];[.$T234];[$JSON.$O$1];[.$W234];[$JSON.$P$1];[.$A234];[$JSON.$Q$1];[.$B234];[$JSON.$R$1])" office:value-type="string" office:string-value="{&quot;id&quot;:&quot;3-5&quot;,&quot;name&quot;:&quot;徳川光圀&quot;,&quot;kana&quot;:&quot;とくがわみつくに&quot;,&quot;traitText&quot;:null,&quot;ruleText&quot;:&quot;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quot;,&quot;legacyText&quot;:&quot;木霊&quot;,&quot;imageUrl&quot;:&quot;https://one-draw.jp/ijinden/cardlist/003/card/03_005.png&quot;,&quot;expansion&quot;:35,&quot;rarity&quot;:4,&quot;type&quot;:1,&quot;level&quot;:5,&quot;color&quot;:4,&quot;term&quot;:2,&quot;trait&quot;:0,&quot;legacy&quot;:8,&quot;orderTable&quot;:233,&quot;orderDeck&quot;:169}," calcext:value-type="string">
            <text:p>{"id":"3-5","name":"徳川光圀","kana":"とくがわみつくに","traitText":null,"ruleText":"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legacyText":"木霊","imageUrl":"https://one-draw.jp/ijinden/cardlist/003/card/03_005.png","expansion":35,"rarity":4,"type":1,"level":5,"color":4,"term":2,"trait":0,"legacy":8,"orderTable":233,"orderDeck":169},</text:p>
          </table:table-cell>
          <table:table-cell table:number-columns-repeated="16347"/>
        </table:table-row>
        <table:table-row table:style-name="ro2">
          <table:table-cell office:value-type="float" office:value="234" calcext:value-type="float">
            <text:p>234</text:p>
          </table:table-cell>
          <table:table-cell office:value-type="float" office:value="211" calcext:value-type="float">
            <text:p>211</text:p>
          </table:table-cell>
          <table:table-cell office:value-type="string" calcext:value-type="string">
            <text:p>3-6</text:p>
          </table:table-cell>
          <table:table-cell office:value-type="float" office:value="6" calcext:value-type="float">
            <text:p>6</text:p>
          </table:table-cell>
          <table:table-cell office:value-type="string" calcext:value-type="string">
            <text:p>葛飾応為</text:p>
          </table:table-cell>
          <table:table-cell office:value-type="string" calcext:value-type="string">
            <text:p>かつしかおうい</text:p>
          </table:table-cell>
          <table:table-cell office:value-type="string" calcext:value-type="string">
            <text:p>第３弾ブースターパック</text:p>
          </table:table-cell>
          <table:table-cell table:formula="of:=VLOOKUP([.G235];[$収録番号.$A$1:$収録番号.$B$9];2;0)" office:value-type="float" office:value="35" calcext:value-type="float">
            <text:p>35</text:p>
          </table:table-cell>
          <table:table-cell office:value-type="string" calcext:value-type="string">
            <text:p>SR</text:p>
          </table:table-cell>
          <table:table-cell table:formula="of:=VLOOKUP([.I235];[$レアリティ番号.$A$1:$レアリティ番号.$B$4];2;0)" office:value-type="float" office:value="4" calcext:value-type="float">
            <text:p>4</text:p>
          </table:table-cell>
          <table:table-cell office:value-type="string" calcext:value-type="string">
            <text:p>イジン</text:p>
          </table:table-cell>
          <table:table-cell table:formula="of:=VLOOKUP([.K235];[$種類番号.$A$1:$種類番号.$B$4];2;0)" office:value-type="float" office:value="1" calcext:value-type="float">
            <text:p>1</text:p>
          </table:table-cell>
          <table:table-cell office:value-type="string" calcext:value-type="string">
            <text:p>緑</text:p>
          </table:table-cell>
          <table:table-cell table:formula="of:=VLOOKUP([.M235];[$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5];[$能力語番号.$A$1:$能力語番号.$B$10];2;0);0)" office:value-type="float" office:value="0" calcext:value-type="float">
            <text:p>0</text:p>
          </table:table-cell>
          <table:table-cell office:value-type="string" calcext:value-type="string">
            <text:p>美術</text:p>
          </table:table-cell>
          <table:table-cell table:formula="of:=IFERROR(VLOOKUP([.$S235];[$特性番号.$A$1:$特性番号.$B$8];2;0);0)" office:value-type="float" office:value="2" calcext:value-type="float">
            <text:p>2</text:p>
          </table:table-cell>
          <table:table-cell office:value-type="string" calcext:value-type="string">
            <text:p>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text:p>
          </table:table-cell>
          <table:table-cell table:style-name="ce8" office:value-type="string" calcext:value-type="string">
            <text:p>魔力化</text:p>
          </table:table-cell>
          <table:table-cell table:formula="of:=IFERROR(VLOOKUP([.$V235];[$遺業能力番号.$A$1:$遺業能力番号.$B$9];2;0);0)" office:value-type="float" office:value="1" calcext:value-type="float">
            <text:p>1</text:p>
          </table:table-cell>
          <table:table-cell office:value-type="string" calcext:value-type="string">
            <text:p>https://one-draw.jp/ijinden/cardlist/003/card/03_006.png</text:p>
          </table:table-cell>
          <table:table-cell table:formula="of:=CONCATENATE([$JSON.$A$1];[.$C235];[$JSON.$B$1];[.$E235];[$JSON.$C$1];[.$F235];[$JSON.$D$1];IF(ISNA([.$S235]);&quot;null&quot;;&quot;&quot;&quot;&quot;&amp;[.$S235]&amp;&quot;&quot;&quot;&quot;);[$JSON.$E$1];[.$U235];[$JSON.$F$1];IF(ISNA([.$V235]);&quot;null&quot;;&quot;&quot;&quot;&quot;&amp;[.$V235]&amp;&quot;&quot;&quot;&quot;);[$JSON.$G$1];[.$X235];[$JSON.$H$1];[.$H235];[$JSON.$I$1];[.J235];[$JSON.$J$1];[.$L235];[$JSON.$K$1];[.$O235];[$JSON.$L$1];[.$N235];[$JSON.$M$1];[.$R235];[$JSON.$N$1];[.$T235];[$JSON.$O$1];[.$W235];[$JSON.$P$1];[.$A235];[$JSON.$Q$1];[.$B235];[$JSON.$R$1])" office:value-type="string" office:string-value="{&quot;id&quot;:&quot;3-6&quot;,&quot;name&quot;:&quot;葛飾応為&quot;,&quot;kana&quot;:&quot;かつしかおうい&quot;,&quot;traitText&quot;:&quot;美術&quot;,&quot;ruleText&quot;:&quot;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quot;,&quot;legacyText&quot;:&quot;魔力化&quot;,&quot;imageUrl&quot;:&quot;https://one-draw.jp/ijinden/cardlist/003/card/03_006.png&quot;,&quot;expansion&quot;:35,&quot;rarity&quot;:4,&quot;type&quot;:1,&quot;level&quot;:7,&quot;color&quot;:4,&quot;term&quot;:0,&quot;trait&quot;:2,&quot;legacy&quot;:1,&quot;orderTable&quot;:234,&quot;orderDeck&quot;:211}," calcext:value-type="string">
            <text:p>{"id":"3-6","name":"葛飾応為","kana":"かつしかおうい","traitText":"美術","ruleText":"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legacyText":"魔力化","imageUrl":"https://one-draw.jp/ijinden/cardlist/003/card/03_006.png","expansion":35,"rarity":4,"type":1,"level":7,"color":4,"term":0,"trait":2,"legacy":1,"orderTable":234,"orderDeck":211},</text:p>
          </table:table-cell>
          <table:table-cell table:number-columns-repeated="16347"/>
        </table:table-row>
        <table:table-row table:style-name="ro2">
          <table:table-cell office:value-type="float" office:value="235" calcext:value-type="float">
            <text:p>235</text:p>
          </table:table-cell>
          <table:table-cell office:value-type="float" office:value="174" calcext:value-type="float">
            <text:p>174</text:p>
          </table:table-cell>
          <table:table-cell office:value-type="string" calcext:value-type="string">
            <text:p>3-7</text:p>
          </table:table-cell>
          <table:table-cell office:value-type="float" office:value="7" calcext:value-type="float">
            <text:p>7</text:p>
          </table:table-cell>
          <table:table-cell office:value-type="string" calcext:value-type="string">
            <text:p>曹丕</text:p>
          </table:table-cell>
          <table:table-cell office:value-type="string" calcext:value-type="string">
            <text:p>そうひ</text:p>
          </table:table-cell>
          <table:table-cell office:value-type="string" calcext:value-type="string">
            <text:p>第３弾ブースターパック</text:p>
          </table:table-cell>
          <table:table-cell table:formula="of:=VLOOKUP([.G236];[$収録番号.$A$1:$収録番号.$B$9];2;0)" office:value-type="float" office:value="35" calcext:value-type="float">
            <text:p>35</text:p>
          </table:table-cell>
          <table:table-cell office:value-type="string" calcext:value-type="string">
            <text:p>SR</text:p>
          </table:table-cell>
          <table:table-cell table:formula="of:=VLOOKUP([.I236];[$レアリティ番号.$A$1:$レアリティ番号.$B$4];2;0)" office:value-type="float" office:value="4" calcext:value-type="float">
            <text:p>4</text:p>
          </table:table-cell>
          <table:table-cell office:value-type="string" calcext:value-type="string">
            <text:p>イジン</text:p>
          </table:table-cell>
          <table:table-cell table:formula="of:=VLOOKUP([.K236];[$種類番号.$A$1:$種類番号.$B$4];2;0)" office:value-type="float" office:value="1" calcext:value-type="float">
            <text:p>1</text:p>
          </table:table-cell>
          <table:table-cell office:value-type="string" calcext:value-type="string">
            <text:p>黄</text:p>
          </table:table-cell>
          <table:table-cell table:formula="of:=VLOOKUP([.M236];[$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3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36];[$特性番号.$A$1:$特性番号.$B$8];2;0);0)" office:value-type="float" office:value="0" calcext:value-type="float">
            <text:p>0</text:p>
          </table:table-cell>
          <table:table-cell office:value-type="string" calcext:value-type="string">
            <text:p>これが戦場にいる間、戦場の黄のイジンは「寝たとき、パワー4000以下のイジン1体を破壊する」を得る。¶執筆 - ハイケイが戦場に置かれたときに発動する。戦場のイジンすべては、このターンに限り「色：黄」を得る。</text:p>
          </table:table-cell>
          <table:table-cell table:style-name="ce8" table:formula="of:=NA()" office:value-type="string" office:string-value="" calcext:value-type="error">
            <text:p>#N/A</text:p>
          </table:table-cell>
          <table:table-cell table:formula="of:=IFERROR(VLOOKUP([.$V236];[$遺業能力番号.$A$1:$遺業能力番号.$B$9];2;0);0)" office:value-type="float" office:value="0" calcext:value-type="float">
            <text:p>0</text:p>
          </table:table-cell>
          <table:table-cell office:value-type="string" calcext:value-type="string">
            <text:p>https://one-draw.jp/ijinden/cardlist/003/card/03_007.png</text:p>
          </table:table-cell>
          <table:table-cell table:formula="of:=CONCATENATE([$JSON.$A$1];[.$C236];[$JSON.$B$1];[.$E236];[$JSON.$C$1];[.$F236];[$JSON.$D$1];IF(ISNA([.$S236]);&quot;null&quot;;&quot;&quot;&quot;&quot;&amp;[.$S236]&amp;&quot;&quot;&quot;&quot;);[$JSON.$E$1];[.$U236];[$JSON.$F$1];IF(ISNA([.$V236]);&quot;null&quot;;&quot;&quot;&quot;&quot;&amp;[.$V236]&amp;&quot;&quot;&quot;&quot;);[$JSON.$G$1];[.$X236];[$JSON.$H$1];[.$H236];[$JSON.$I$1];[.J236];[$JSON.$J$1];[.$L236];[$JSON.$K$1];[.$O236];[$JSON.$L$1];[.$N236];[$JSON.$M$1];[.$R236];[$JSON.$N$1];[.$T236];[$JSON.$O$1];[.$W236];[$JSON.$P$1];[.$A236];[$JSON.$Q$1];[.$B236];[$JSON.$R$1])" office:value-type="string" office:string-value="{&quot;id&quot;:&quot;3-7&quot;,&quot;name&quot;:&quot;曹丕&quot;,&quot;kana&quot;:&quot;そうひ&quot;,&quot;traitText&quot;:null,&quot;ruleText&quot;:&quot;これが戦場にいる間、戦場の黄のイジンは「寝たとき、パワー4000以下のイジン1体を破壊する」を得る。¶執筆 - ハイケイが戦場に置かれたときに発動する。戦場のイジンすべては、このターンに限り「色：黄」を得る。&quot;,&quot;legacyText&quot;:null,&quot;imageUrl&quot;:&quot;https://one-draw.jp/ijinden/cardlist/003/card/03_007.png&quot;,&quot;expansion&quot;:35,&quot;rarity&quot;:4,&quot;type&quot;:1,&quot;level&quot;:5,&quot;color&quot;:8,&quot;term&quot;:2,&quot;trait&quot;:0,&quot;legacy&quot;:0,&quot;orderTable&quot;:235,&quot;orderDeck&quot;:174}," calcext:value-type="string">
            <text:p>{"id":"3-7","name":"曹丕","kana":"そうひ","traitText":null,"ruleText":"これが戦場にいる間、戦場の黄のイジンは「寝たとき、パワー4000以下のイジン1体を破壊する」を得る。¶執筆 - ハイケイが戦場に置かれたときに発動する。戦場のイジンすべては、このターンに限り「色：黄」を得る。","legacyText":null,"imageUrl":"https://one-draw.jp/ijinden/cardlist/003/card/03_007.png","expansion":35,"rarity":4,"type":1,"level":5,"color":8,"term":2,"trait":0,"legacy":0,"orderTable":235,"orderDeck":174},</text:p>
          </table:table-cell>
          <table:table-cell table:number-columns-repeated="16347"/>
        </table:table-row>
        <table:table-row table:style-name="ro2">
          <table:table-cell office:value-type="float" office:value="236" calcext:value-type="float">
            <text:p>236</text:p>
          </table:table-cell>
          <table:table-cell office:value-type="float" office:value="226" calcext:value-type="float">
            <text:p>226</text:p>
          </table:table-cell>
          <table:table-cell office:value-type="string" calcext:value-type="string">
            <text:p>3-8</text:p>
          </table:table-cell>
          <table:table-cell office:value-type="float" office:value="8" calcext:value-type="float">
            <text:p>8</text:p>
          </table:table-cell>
          <table:table-cell office:value-type="string" calcext:value-type="string">
            <text:p>ジェーン・オースティン</text:p>
          </table:table-cell>
          <table:table-cell office:value-type="string" calcext:value-type="string">
            <text:p>じぇーんおーすてぃん</text:p>
          </table:table-cell>
          <table:table-cell office:value-type="string" calcext:value-type="string">
            <text:p>第３弾ブースターパック</text:p>
          </table:table-cell>
          <table:table-cell table:formula="of:=VLOOKUP([.G237];[$収録番号.$A$1:$収録番号.$B$9];2;0)" office:value-type="float" office:value="35" calcext:value-type="float">
            <text:p>35</text:p>
          </table:table-cell>
          <table:table-cell office:value-type="string" calcext:value-type="string">
            <text:p>SR</text:p>
          </table:table-cell>
          <table:table-cell table:formula="of:=VLOOKUP([.I237];[$レアリティ番号.$A$1:$レアリティ番号.$B$4];2;0)" office:value-type="float" office:value="4" calcext:value-type="float">
            <text:p>4</text:p>
          </table:table-cell>
          <table:table-cell office:value-type="string" calcext:value-type="string">
            <text:p>イジン</text:p>
          </table:table-cell>
          <table:table-cell table:formula="of:=VLOOKUP([.K237];[$種類番号.$A$1:$種類番号.$B$4];2;0)" office:value-type="float" office:value="1" calcext:value-type="float">
            <text:p>1</text:p>
          </table:table-cell>
          <table:table-cell office:value-type="string" calcext:value-type="string">
            <text:p>黄</text:p>
          </table:table-cell>
          <table:table-cell table:formula="of:=VLOOKUP([.M237];[$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37];[$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37];[$特性番号.$A$1:$特性番号.$B$8];2;0);0)" office:value-type="float" office:value="0" calcext:value-type="float">
            <text:p>0</text:p>
          </table:table-cell>
          <table:table-cell office:value-type="string" calcext:value-type="string">
            <text:p>これのイジン召喚に際し、これのレベルは、戦場の「執筆」を持つイジン1体につき1だけ下がる。¶執筆 - ハイケイが戦場に置かれるたび、相手の戦場のイジン1体を山札の下に戻す。</text:p>
          </table:table-cell>
          <table:table-cell table:style-name="ce8" office:value-type="string" calcext:value-type="string">
            <text:p>魔力化</text:p>
          </table:table-cell>
          <table:table-cell table:formula="of:=IFERROR(VLOOKUP([.$V237];[$遺業能力番号.$A$1:$遺業能力番号.$B$9];2;0);0)" office:value-type="float" office:value="1" calcext:value-type="float">
            <text:p>1</text:p>
          </table:table-cell>
          <table:table-cell office:value-type="string" calcext:value-type="string">
            <text:p>https://one-draw.jp/ijinden/cardlist/003/card/03_008.png</text:p>
          </table:table-cell>
          <table:table-cell table:formula="of:=CONCATENATE([$JSON.$A$1];[.$C237];[$JSON.$B$1];[.$E237];[$JSON.$C$1];[.$F237];[$JSON.$D$1];IF(ISNA([.$S237]);&quot;null&quot;;&quot;&quot;&quot;&quot;&amp;[.$S237]&amp;&quot;&quot;&quot;&quot;);[$JSON.$E$1];[.$U237];[$JSON.$F$1];IF(ISNA([.$V237]);&quot;null&quot;;&quot;&quot;&quot;&quot;&amp;[.$V237]&amp;&quot;&quot;&quot;&quot;);[$JSON.$G$1];[.$X237];[$JSON.$H$1];[.$H237];[$JSON.$I$1];[.J237];[$JSON.$J$1];[.$L237];[$JSON.$K$1];[.$O237];[$JSON.$L$1];[.$N237];[$JSON.$M$1];[.$R237];[$JSON.$N$1];[.$T237];[$JSON.$O$1];[.$W237];[$JSON.$P$1];[.$A237];[$JSON.$Q$1];[.$B237];[$JSON.$R$1])" office:value-type="string" office:string-value="{&quot;id&quot;:&quot;3-8&quot;,&quot;name&quot;:&quot;ジェーン・オースティン&quot;,&quot;kana&quot;:&quot;じぇーんおーすてぃん&quot;,&quot;traitText&quot;:null,&quot;ruleText&quot;:&quot;これのイジン召喚に際し、これのレベルは、戦場の「執筆」を持つイジン1体につき1だけ下がる。¶執筆 - ハイケイが戦場に置かれるたび、相手の戦場のイジン1体を山札の下に戻す。&quot;,&quot;legacyText&quot;:&quot;魔力化&quot;,&quot;imageUrl&quot;:&quot;https://one-draw.jp/ijinden/cardlist/003/card/03_008.png&quot;,&quot;expansion&quot;:35,&quot;rarity&quot;:4,&quot;type&quot;:1,&quot;level&quot;:8,&quot;color&quot;:8,&quot;term&quot;:2,&quot;trait&quot;:0,&quot;legacy&quot;:1,&quot;orderTable&quot;:236,&quot;orderDeck&quot;:226}," calcext:value-type="string">
            <text:p>{"id":"3-8","name":"ジェーン・オースティン","kana":"じぇーんおーすてぃん","traitText":null,"ruleText":"これのイジン召喚に際し、これのレベルは、戦場の「執筆」を持つイジン1体につき1だけ下がる。¶執筆 - ハイケイが戦場に置かれるたび、相手の戦場のイジン1体を山札の下に戻す。","legacyText":"魔力化","imageUrl":"https://one-draw.jp/ijinden/cardlist/003/card/03_008.png","expansion":35,"rarity":4,"type":1,"level":8,"color":8,"term":2,"trait":0,"legacy":1,"orderTable":236,"orderDeck":226},</text:p>
          </table:table-cell>
          <table:table-cell table:number-columns-repeated="16347"/>
        </table:table-row>
        <table:table-row table:style-name="ro2">
          <table:table-cell office:value-type="float" office:value="237" calcext:value-type="float">
            <text:p>237</text:p>
          </table:table-cell>
          <table:table-cell office:value-type="float" office:value="200" calcext:value-type="float">
            <text:p>200</text:p>
          </table:table-cell>
          <table:table-cell office:value-type="string" calcext:value-type="string">
            <text:p>3-9</text:p>
          </table:table-cell>
          <table:table-cell office:value-type="float" office:value="9" calcext:value-type="float">
            <text:p>9</text:p>
          </table:table-cell>
          <table:table-cell office:value-type="string" calcext:value-type="string">
            <text:p>土方歳三</text:p>
          </table:table-cell>
          <table:table-cell office:value-type="string" calcext:value-type="string">
            <text:p>ひじかたとしぞう</text:p>
          </table:table-cell>
          <table:table-cell office:value-type="string" calcext:value-type="string">
            <text:p>第３弾ブースターパック</text:p>
          </table:table-cell>
          <table:table-cell table:formula="of:=VLOOKUP([.G238];[$収録番号.$A$1:$収録番号.$B$9];2;0)" office:value-type="float" office:value="35" calcext:value-type="float">
            <text:p>35</text:p>
          </table:table-cell>
          <table:table-cell office:value-type="string" calcext:value-type="string">
            <text:p>SR</text:p>
          </table:table-cell>
          <table:table-cell table:formula="of:=VLOOKUP([.I238];[$レアリティ番号.$A$1:$レアリティ番号.$B$4];2;0)" office:value-type="float" office:value="4" calcext:value-type="float">
            <text:p>4</text:p>
          </table:table-cell>
          <table:table-cell office:value-type="string" calcext:value-type="string">
            <text:p>イジン</text:p>
          </table:table-cell>
          <table:table-cell table:formula="of:=VLOOKUP([.K238];[$種類番号.$A$1:$種類番号.$B$4];2;0)" office:value-type="float" office:value="1" calcext:value-type="float">
            <text:p>1</text:p>
          </table:table-cell>
          <table:table-cell office:value-type="string" calcext:value-type="string">
            <text:p>紫</text:p>
          </table:table-cell>
          <table:table-cell table:formula="of:=VLOOKUP([.M238];[$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8];[$能力語番号.$A$1:$能力語番号.$B$10];2;0);0)" office:value-type="float" office:value="0" calcext:value-type="float">
            <text:p>0</text:p>
          </table:table-cell>
          <table:table-cell office:value-type="string" calcext:value-type="string">
            <text:p>志願</text:p>
          </table:table-cell>
          <table:table-cell table:formula="of:=IFERROR(VLOOKUP([.$S238];[$特性番号.$A$1:$特性番号.$B$8];2;0);0)" office:value-type="float" office:value="32" calcext:value-type="float">
            <text:p>32</text:p>
          </table:table-cell>
          <table:table-cell office:value-type="string" calcext:value-type="string">
            <text:p>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text:p>
          </table:table-cell>
          <table:table-cell table:style-name="ce8" office:value-type="string" calcext:value-type="string">
            <text:p>山札の上か下に戻す</text:p>
          </table:table-cell>
          <table:table-cell table:formula="of:=IFERROR(VLOOKUP([.$V238];[$遺業能力番号.$A$1:$遺業能力番号.$B$9];2;0);0)" office:value-type="float" office:value="7" calcext:value-type="float">
            <text:p>7</text:p>
          </table:table-cell>
          <table:table-cell office:value-type="string" calcext:value-type="string">
            <text:p>https://one-draw.jp/ijinden/cardlist/003/card/03_009.png</text:p>
          </table:table-cell>
          <table:table-cell table:formula="of:=CONCATENATE([$JSON.$A$1];[.$C238];[$JSON.$B$1];[.$E238];[$JSON.$C$1];[.$F238];[$JSON.$D$1];IF(ISNA([.$S238]);&quot;null&quot;;&quot;&quot;&quot;&quot;&amp;[.$S238]&amp;&quot;&quot;&quot;&quot;);[$JSON.$E$1];[.$U238];[$JSON.$F$1];IF(ISNA([.$V238]);&quot;null&quot;;&quot;&quot;&quot;&quot;&amp;[.$V238]&amp;&quot;&quot;&quot;&quot;);[$JSON.$G$1];[.$X238];[$JSON.$H$1];[.$H238];[$JSON.$I$1];[.J238];[$JSON.$J$1];[.$L238];[$JSON.$K$1];[.$O238];[$JSON.$L$1];[.$N238];[$JSON.$M$1];[.$R238];[$JSON.$N$1];[.$T238];[$JSON.$O$1];[.$W238];[$JSON.$P$1];[.$A238];[$JSON.$Q$1];[.$B238];[$JSON.$R$1])" office:value-type="string" office:string-value="{&quot;id&quot;:&quot;3-9&quot;,&quot;name&quot;:&quot;土方歳三&quot;,&quot;kana&quot;:&quot;ひじかたとしぞう&quot;,&quot;traitText&quot;:&quot;志願&quot;,&quot;ruleText&quot;:&quo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quot;,&quot;legacyText&quot;:&quot;山札の上か下に戻す&quot;,&quot;imageUrl&quot;:&quot;https://one-draw.jp/ijinden/cardlist/003/card/03_009.png&quot;,&quot;expansion&quot;:35,&quot;rarity&quot;:4,&quot;type&quot;:1,&quot;level&quot;:6,&quot;color&quot;:16,&quot;term&quot;:0,&quot;trait&quot;:32,&quot;legacy&quot;:7,&quot;orderTable&quot;:237,&quot;orderDeck&quot;:200}," calcext:value-type="string">
            <text:p>{"id":"3-9","name":"土方歳三","kana":"ひじかたとしぞう","traitText":"志願","ruleTex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legacyText":"山札の上か下に戻す","imageUrl":"https://one-draw.jp/ijinden/cardlist/003/card/03_009.png","expansion":35,"rarity":4,"type":1,"level":6,"color":16,"term":0,"trait":32,"legacy":7,"orderTable":237,"orderDeck":200},</text:p>
          </table:table-cell>
          <table:table-cell table:number-columns-repeated="16347"/>
        </table:table-row>
        <table:table-row table:style-name="ro2">
          <table:table-cell office:value-type="float" office:value="238" calcext:value-type="float">
            <text:p>238</text:p>
          </table:table-cell>
          <table:table-cell office:value-type="float" office:value="60" calcext:value-type="float">
            <text:p>60</text:p>
          </table:table-cell>
          <table:table-cell office:value-type="string" calcext:value-type="string">
            <text:p>3-10</text:p>
          </table:table-cell>
          <table:table-cell office:value-type="float" office:value="10" calcext:value-type="float">
            <text:p>10</text:p>
          </table:table-cell>
          <table:table-cell office:value-type="string" calcext:value-type="string">
            <text:p>武則天</text:p>
          </table:table-cell>
          <table:table-cell office:value-type="string" calcext:value-type="string">
            <text:p>ぶそくてん</text:p>
          </table:table-cell>
          <table:table-cell office:value-type="string" calcext:value-type="string">
            <text:p>第３弾ブースターパック</text:p>
          </table:table-cell>
          <table:table-cell table:formula="of:=VLOOKUP([.G239];[$収録番号.$A$1:$収録番号.$B$9];2;0)" office:value-type="float" office:value="35" calcext:value-type="float">
            <text:p>35</text:p>
          </table:table-cell>
          <table:table-cell office:value-type="string" calcext:value-type="string">
            <text:p>SR</text:p>
          </table:table-cell>
          <table:table-cell table:formula="of:=VLOOKUP([.I239];[$レアリティ番号.$A$1:$レアリティ番号.$B$4];2;0)" office:value-type="float" office:value="4" calcext:value-type="float">
            <text:p>4</text:p>
          </table:table-cell>
          <table:table-cell office:value-type="string" calcext:value-type="string">
            <text:p>イジン</text:p>
          </table:table-cell>
          <table:table-cell table:formula="of:=VLOOKUP([.K239];[$種類番号.$A$1:$種類番号.$B$4];2;0)" office:value-type="float" office:value="1" calcext:value-type="float">
            <text:p>1</text:p>
          </table:table-cell>
          <table:table-cell office:value-type="string" calcext:value-type="string">
            <text:p>紫</text:p>
          </table:table-cell>
          <table:table-cell table:formula="of:=VLOOKUP([.M239];[$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39];[$特性番号.$A$1:$特性番号.$B$8];2;0);0)" office:value-type="float" office:value="0" calcext:value-type="float">
            <text:p>0</text:p>
          </table:table-cell>
          <table:table-cell office:value-type="string" calcext:value-type="string">
            <text:p>能力によって相手のマリョク配置権が増えたとき、相手の山札の上から1枚を墓地に置く。¶能力によって相手のイジン召喚権が増えたとき、相手の手札のカード1つを墓地に置く。そのカードは相手が選ぶ。</text:p>
          </table:table-cell>
          <table:table-cell table:style-name="ce8" office:value-type="string" calcext:value-type="string">
            <text:p>1ドローする</text:p>
          </table:table-cell>
          <table:table-cell table:formula="of:=IFERROR(VLOOKUP([.$V239];[$遺業能力番号.$A$1:$遺業能力番号.$B$9];2;0);0)" office:value-type="float" office:value="4" calcext:value-type="float">
            <text:p>4</text:p>
          </table:table-cell>
          <table:table-cell office:value-type="string" calcext:value-type="string">
            <text:p>https://one-draw.jp/ijinden/cardlist/003/card/03_010.png</text:p>
          </table:table-cell>
          <table:table-cell table:formula="of:=CONCATENATE([$JSON.$A$1];[.$C239];[$JSON.$B$1];[.$E239];[$JSON.$C$1];[.$F239];[$JSON.$D$1];IF(ISNA([.$S239]);&quot;null&quot;;&quot;&quot;&quot;&quot;&amp;[.$S239]&amp;&quot;&quot;&quot;&quot;);[$JSON.$E$1];[.$U239];[$JSON.$F$1];IF(ISNA([.$V239]);&quot;null&quot;;&quot;&quot;&quot;&quot;&amp;[.$V239]&amp;&quot;&quot;&quot;&quot;);[$JSON.$G$1];[.$X239];[$JSON.$H$1];[.$H239];[$JSON.$I$1];[.J239];[$JSON.$J$1];[.$L239];[$JSON.$K$1];[.$O239];[$JSON.$L$1];[.$N239];[$JSON.$M$1];[.$R239];[$JSON.$N$1];[.$T239];[$JSON.$O$1];[.$W239];[$JSON.$P$1];[.$A239];[$JSON.$Q$1];[.$B239];[$JSON.$R$1])" office:value-type="string" office:string-value="{&quot;id&quot;:&quot;3-10&quot;,&quot;name&quot;:&quot;武則天&quot;,&quot;kana&quot;:&quot;ぶそくてん&quot;,&quot;traitText&quot;:null,&quot;ruleText&quot;:&quot;能力によって相手のマリョク配置権が増えたとき、相手の山札の上から1枚を墓地に置く。¶能力によって相手のイジン召喚権が増えたとき、相手の手札のカード1つを墓地に置く。そのカードは相手が選ぶ。&quot;,&quot;legacyText&quot;:&quot;1ドローする&quot;,&quot;imageUrl&quot;:&quot;https://one-draw.jp/ijinden/cardlist/003/card/03_010.png&quot;,&quot;expansion&quot;:35,&quot;rarity&quot;:4,&quot;type&quot;:1,&quot;level&quot;:2,&quot;color&quot;:16,&quot;term&quot;:0,&quot;trait&quot;:0,&quot;legacy&quot;:4,&quot;orderTable&quot;:238,&quot;orderDeck&quot;:60}," calcext:value-type="string">
            <text:p>{"id":"3-10","name":"武則天","kana":"ぶそくてん","traitText":null,"ruleText":"能力によって相手のマリョク配置権が増えたとき、相手の山札の上から1枚を墓地に置く。¶能力によって相手のイジン召喚権が増えたとき、相手の手札のカード1つを墓地に置く。そのカードは相手が選ぶ。","legacyText":"1ドローする","imageUrl":"https://one-draw.jp/ijinden/cardlist/003/card/03_010.png","expansion":35,"rarity":4,"type":1,"level":2,"color":16,"term":0,"trait":0,"legacy":4,"orderTable":238,"orderDeck":60},</text:p>
          </table:table-cell>
          <table:table-cell table:number-columns-repeated="16347"/>
        </table:table-row>
        <table:table-row table:style-name="ro2">
          <table:table-cell office:value-type="float" office:value="239" calcext:value-type="float">
            <text:p>239</text:p>
          </table:table-cell>
          <table:table-cell office:value-type="float" office:value="112" calcext:value-type="float">
            <text:p>112</text:p>
          </table:table-cell>
          <table:table-cell office:value-type="string" calcext:value-type="string">
            <text:p>3-11</text:p>
          </table:table-cell>
          <table:table-cell office:value-type="float" office:value="11" calcext:value-type="float">
            <text:p>11</text:p>
          </table:table-cell>
          <table:table-cell office:value-type="string" calcext:value-type="string">
            <text:p>ウィリアム・セシル</text:p>
          </table:table-cell>
          <table:table-cell office:value-type="string" calcext:value-type="string">
            <text:p>うぃりあむせしる</text:p>
          </table:table-cell>
          <table:table-cell office:value-type="string" calcext:value-type="string">
            <text:p>第３弾ブースターパック</text:p>
          </table:table-cell>
          <table:table-cell table:formula="of:=VLOOKUP([.G240];[$収録番号.$A$1:$収録番号.$B$9];2;0)" office:value-type="float" office:value="35" calcext:value-type="float">
            <text:p>35</text:p>
          </table:table-cell>
          <table:table-cell office:value-type="string" calcext:value-type="string">
            <text:p>N</text:p>
          </table:table-cell>
          <table:table-cell table:formula="of:=VLOOKUP([.I240];[$レアリティ番号.$A$1:$レアリティ番号.$B$4];2;0)" office:value-type="float" office:value="1" calcext:value-type="float">
            <text:p>1</text:p>
          </table:table-cell>
          <table:table-cell office:value-type="string" calcext:value-type="string">
            <text:p>イジン</text:p>
          </table:table-cell>
          <table:table-cell table:formula="of:=VLOOKUP([.K240];[$種類番号.$A$1:$種類番号.$B$4];2;0)" office:value-type="float" office:value="1" calcext:value-type="float">
            <text:p>1</text:p>
          </table:table-cell>
          <table:table-cell office:value-type="string" calcext:value-type="string">
            <text:p>赤</text:p>
          </table:table-cell>
          <table:table-cell table:formula="of:=VLOOKUP([.M240];[$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0];[$特性番号.$A$1:$特性番号.$B$8];2;0);0)" office:value-type="float" office:value="0" calcext:value-type="float">
            <text:p>0</text:p>
          </table:table-cell>
          <table:table-cell office:value-type="string" calcext:value-type="string">
            <text:p>スタンド¶戦場に置かれたとき、1ドローする。</text:p>
          </table:table-cell>
          <table:table-cell table:style-name="ce8" office:value-type="string" calcext:value-type="string">
            <text:p>1ドローする</text:p>
          </table:table-cell>
          <table:table-cell table:formula="of:=IFERROR(VLOOKUP([.$V240];[$遺業能力番号.$A$1:$遺業能力番号.$B$9];2;0);0)" office:value-type="float" office:value="4" calcext:value-type="float">
            <text:p>4</text:p>
          </table:table-cell>
          <table:table-cell office:value-type="string" calcext:value-type="string">
            <text:p>https://one-draw.jp/ijinden/cardlist/003/card/03_011.png</text:p>
          </table:table-cell>
          <table:table-cell table:formula="of:=CONCATENATE([$JSON.$A$1];[.$C240];[$JSON.$B$1];[.$E240];[$JSON.$C$1];[.$F240];[$JSON.$D$1];IF(ISNA([.$S240]);&quot;null&quot;;&quot;&quot;&quot;&quot;&amp;[.$S240]&amp;&quot;&quot;&quot;&quot;);[$JSON.$E$1];[.$U240];[$JSON.$F$1];IF(ISNA([.$V240]);&quot;null&quot;;&quot;&quot;&quot;&quot;&amp;[.$V240]&amp;&quot;&quot;&quot;&quot;);[$JSON.$G$1];[.$X240];[$JSON.$H$1];[.$H240];[$JSON.$I$1];[.J240];[$JSON.$J$1];[.$L240];[$JSON.$K$1];[.$O240];[$JSON.$L$1];[.$N240];[$JSON.$M$1];[.$R240];[$JSON.$N$1];[.$T240];[$JSON.$O$1];[.$W240];[$JSON.$P$1];[.$A240];[$JSON.$Q$1];[.$B240];[$JSON.$R$1])" office:value-type="string" office:string-value="{&quot;id&quot;:&quot;3-11&quot;,&quot;name&quot;:&quot;ウィリアム・セシル&quot;,&quot;kana&quot;:&quot;うぃりあむせしる&quot;,&quot;traitText&quot;:null,&quot;ruleText&quot;:&quot;スタンド¶戦場に置かれたとき、1ドローする。&quot;,&quot;legacyText&quot;:&quot;1ドローする&quot;,&quot;imageUrl&quot;:&quot;https://one-draw.jp/ijinden/cardlist/003/card/03_011.png&quot;,&quot;expansion&quot;:35,&quot;rarity&quot;:1,&quot;type&quot;:1,&quot;level&quot;:4,&quot;color&quot;:1,&quot;term&quot;:0,&quot;trait&quot;:0,&quot;legacy&quot;:4,&quot;orderTable&quot;:239,&quot;orderDeck&quot;:112}," calcext:value-type="string">
            <text:p>{"id":"3-11","name":"ウィリアム・セシル","kana":"うぃりあむせしる","traitText":null,"ruleText":"スタンド¶戦場に置かれたとき、1ドローする。","legacyText":"1ドローする","imageUrl":"https://one-draw.jp/ijinden/cardlist/003/card/03_011.png","expansion":35,"rarity":1,"type":1,"level":4,"color":1,"term":0,"trait":0,"legacy":4,"orderTable":239,"orderDeck":112},</text:p>
          </table:table-cell>
          <table:table-cell table:number-columns-repeated="16347"/>
        </table:table-row>
        <table:table-row table:style-name="ro2">
          <table:table-cell office:value-type="float" office:value="240" calcext:value-type="float">
            <text:p>240</text:p>
          </table:table-cell>
          <table:table-cell office:value-type="float" office:value="71" calcext:value-type="float">
            <text:p>71</text:p>
          </table:table-cell>
          <table:table-cell office:value-type="string" calcext:value-type="string">
            <text:p>3-12</text:p>
          </table:table-cell>
          <table:table-cell office:value-type="float" office:value="12" calcext:value-type="float">
            <text:p>12</text:p>
          </table:table-cell>
          <table:table-cell office:value-type="string" calcext:value-type="string">
            <text:p>イーライ・ホイットニー</text:p>
          </table:table-cell>
          <table:table-cell office:value-type="string" calcext:value-type="string">
            <text:p>いーらいほいっとにー</text:p>
          </table:table-cell>
          <table:table-cell office:value-type="string" calcext:value-type="string">
            <text:p>第３弾ブースターパック</text:p>
          </table:table-cell>
          <table:table-cell table:formula="of:=VLOOKUP([.G241];[$収録番号.$A$1:$収録番号.$B$9];2;0)" office:value-type="float" office:value="35" calcext:value-type="float">
            <text:p>35</text:p>
          </table:table-cell>
          <table:table-cell office:value-type="string" calcext:value-type="string">
            <text:p>N</text:p>
          </table:table-cell>
          <table:table-cell table:formula="of:=VLOOKUP([.I241];[$レアリティ番号.$A$1:$レアリティ番号.$B$4];2;0)" office:value-type="float" office:value="1" calcext:value-type="float">
            <text:p>1</text:p>
          </table:table-cell>
          <table:table-cell office:value-type="string" calcext:value-type="string">
            <text:p>イジン</text:p>
          </table:table-cell>
          <table:table-cell table:formula="of:=VLOOKUP([.K241];[$種類番号.$A$1:$種類番号.$B$4];2;0)" office:value-type="float" office:value="1" calcext:value-type="float">
            <text:p>1</text:p>
          </table:table-cell>
          <table:table-cell office:value-type="string" calcext:value-type="string">
            <text:p>赤</text:p>
          </table:table-cell>
          <table:table-cell table:formula="of:=VLOOKUP([.M241];[$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1];[$特性番号.$A$1:$特性番号.$B$8];2;0);0)" office:value-type="float" office:value="0" calcext:value-type="float">
            <text:p>0</text:p>
          </table:table-cell>
          <table:table-cell office:value-type="string" calcext:value-type="string">
            <text:p>戦場に置かれたとき、自分の魔力ゾーンの裏のカード1つを手札に戻して発動できる。相手の戦場のパワー3000以下のイジン1体を破壊する。</text:p>
          </table:table-cell>
          <table:table-cell table:style-name="ce8" office:value-type="string" calcext:value-type="string">
            <text:p>1ドローする</text:p>
          </table:table-cell>
          <table:table-cell table:formula="of:=IFERROR(VLOOKUP([.$V241];[$遺業能力番号.$A$1:$遺業能力番号.$B$9];2;0);0)" office:value-type="float" office:value="4" calcext:value-type="float">
            <text:p>4</text:p>
          </table:table-cell>
          <table:table-cell office:value-type="string" calcext:value-type="string">
            <text:p>https://one-draw.jp/ijinden/cardlist/003/card/03_012.png</text:p>
          </table:table-cell>
          <table:table-cell table:formula="of:=CONCATENATE([$JSON.$A$1];[.$C241];[$JSON.$B$1];[.$E241];[$JSON.$C$1];[.$F241];[$JSON.$D$1];IF(ISNA([.$S241]);&quot;null&quot;;&quot;&quot;&quot;&quot;&amp;[.$S241]&amp;&quot;&quot;&quot;&quot;);[$JSON.$E$1];[.$U241];[$JSON.$F$1];IF(ISNA([.$V241]);&quot;null&quot;;&quot;&quot;&quot;&quot;&amp;[.$V241]&amp;&quot;&quot;&quot;&quot;);[$JSON.$G$1];[.$X241];[$JSON.$H$1];[.$H241];[$JSON.$I$1];[.J241];[$JSON.$J$1];[.$L241];[$JSON.$K$1];[.$O241];[$JSON.$L$1];[.$N241];[$JSON.$M$1];[.$R241];[$JSON.$N$1];[.$T241];[$JSON.$O$1];[.$W241];[$JSON.$P$1];[.$A241];[$JSON.$Q$1];[.$B241];[$JSON.$R$1])" office:value-type="string" office:string-value="{&quot;id&quot;:&quot;3-12&quot;,&quot;name&quot;:&quot;イーライ・ホイットニー&quot;,&quot;kana&quot;:&quot;いーらいほいっとにー&quot;,&quot;traitText&quot;:null,&quot;ruleText&quot;:&quot;戦場に置かれたとき、自分の魔力ゾーンの裏のカード1つを手札に戻して発動できる。相手の戦場のパワー3000以下のイジン1体を破壊する。&quot;,&quot;legacyText&quot;:&quot;1ドローする&quot;,&quot;imageUrl&quot;:&quot;https://one-draw.jp/ijinden/cardlist/003/card/03_012.png&quot;,&quot;expansion&quot;:35,&quot;rarity&quot;:1,&quot;type&quot;:1,&quot;level&quot;:3,&quot;color&quot;:1,&quot;term&quot;:0,&quot;trait&quot;:0,&quot;legacy&quot;:4,&quot;orderTable&quot;:240,&quot;orderDeck&quot;:71}," calcext:value-type="string">
            <text:p>{"id":"3-12","name":"イーライ・ホイットニー","kana":"いーらいほいっとにー","traitText":null,"ruleText":"戦場に置かれたとき、自分の魔力ゾーンの裏のカード1つを手札に戻して発動できる。相手の戦場のパワー3000以下のイジン1体を破壊する。","legacyText":"1ドローする","imageUrl":"https://one-draw.jp/ijinden/cardlist/003/card/03_012.png","expansion":35,"rarity":1,"type":1,"level":3,"color":1,"term":0,"trait":0,"legacy":4,"orderTable":240,"orderDeck":71},</text:p>
          </table:table-cell>
          <table:table-cell table:number-columns-repeated="16347"/>
        </table:table-row>
        <table:table-row table:style-name="ro2">
          <table:table-cell office:value-type="float" office:value="241" calcext:value-type="float">
            <text:p>241</text:p>
          </table:table-cell>
          <table:table-cell office:value-type="float" office:value="29" calcext:value-type="float">
            <text:p>29</text:p>
          </table:table-cell>
          <table:table-cell office:value-type="string" calcext:value-type="string">
            <text:p>3-13</text:p>
          </table:table-cell>
          <table:table-cell office:value-type="float" office:value="13" calcext:value-type="float">
            <text:p>13</text:p>
          </table:table-cell>
          <table:table-cell office:value-type="string" calcext:value-type="string">
            <text:p>平賀源内</text:p>
          </table:table-cell>
          <table:table-cell office:value-type="string" calcext:value-type="string">
            <text:p>ひらがげんない</text:p>
          </table:table-cell>
          <table:table-cell office:value-type="string" calcext:value-type="string">
            <text:p>第３弾ブースターパック</text:p>
          </table:table-cell>
          <table:table-cell table:formula="of:=VLOOKUP([.G242];[$収録番号.$A$1:$収録番号.$B$9];2;0)" office:value-type="float" office:value="35" calcext:value-type="float">
            <text:p>35</text:p>
          </table:table-cell>
          <table:table-cell office:value-type="string" calcext:value-type="string">
            <text:p>N</text:p>
          </table:table-cell>
          <table:table-cell table:formula="of:=VLOOKUP([.I242];[$レアリティ番号.$A$1:$レアリティ番号.$B$4];2;0)" office:value-type="float" office:value="1" calcext:value-type="float">
            <text:p>1</text:p>
          </table:table-cell>
          <table:table-cell office:value-type="string" calcext:value-type="string">
            <text:p>イジン</text:p>
          </table:table-cell>
          <table:table-cell table:formula="of:=VLOOKUP([.K242];[$種類番号.$A$1:$種類番号.$B$4];2;0)" office:value-type="float" office:value="1" calcext:value-type="float">
            <text:p>1</text:p>
          </table:table-cell>
          <table:table-cell office:value-type="string" calcext:value-type="string">
            <text:p>赤</text:p>
          </table:table-cell>
          <table:table-cell table:formula="of:=VLOOKUP([.M242];[$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2];[$特性番号.$A$1:$特性番号.$B$8];2;0);0)" office:value-type="float" office:value="0" calcext:value-type="float">
            <text:p>0</text:p>
          </table:table-cell>
          <table:table-cell office:value-type="string" calcext:value-type="string">
            <text:p>戦場に置かれたとき、自分の魔力ゾーンのマリョク1つを裏にして、相手の戦場のパワー1000以下のイジン1体か、相手の戦場のハイケイ1つを指定して発動できる。そのイジンかハイケイを破壊する。</text:p>
          </table:table-cell>
          <table:table-cell table:style-name="ce8" office:value-type="string" calcext:value-type="string">
            <text:p>1ドローする</text:p>
          </table:table-cell>
          <table:table-cell table:formula="of:=IFERROR(VLOOKUP([.$V242];[$遺業能力番号.$A$1:$遺業能力番号.$B$9];2;0);0)" office:value-type="float" office:value="4" calcext:value-type="float">
            <text:p>4</text:p>
          </table:table-cell>
          <table:table-cell office:value-type="string" calcext:value-type="string">
            <text:p>https://one-draw.jp/ijinden/cardlist/003/card/03_013.png</text:p>
          </table:table-cell>
          <table:table-cell table:formula="of:=CONCATENATE([$JSON.$A$1];[.$C242];[$JSON.$B$1];[.$E242];[$JSON.$C$1];[.$F242];[$JSON.$D$1];IF(ISNA([.$S242]);&quot;null&quot;;&quot;&quot;&quot;&quot;&amp;[.$S242]&amp;&quot;&quot;&quot;&quot;);[$JSON.$E$1];[.$U242];[$JSON.$F$1];IF(ISNA([.$V242]);&quot;null&quot;;&quot;&quot;&quot;&quot;&amp;[.$V242]&amp;&quot;&quot;&quot;&quot;);[$JSON.$G$1];[.$X242];[$JSON.$H$1];[.$H242];[$JSON.$I$1];[.J242];[$JSON.$J$1];[.$L242];[$JSON.$K$1];[.$O242];[$JSON.$L$1];[.$N242];[$JSON.$M$1];[.$R242];[$JSON.$N$1];[.$T242];[$JSON.$O$1];[.$W242];[$JSON.$P$1];[.$A242];[$JSON.$Q$1];[.$B242];[$JSON.$R$1])" office:value-type="string" office:string-value="{&quot;id&quot;:&quot;3-13&quot;,&quot;name&quot;:&quot;平賀源内&quot;,&quot;kana&quot;:&quot;ひらがげんない&quot;,&quot;traitText&quot;:null,&quot;ruleText&quot;:&quot;戦場に置かれたとき、自分の魔力ゾーンのマリョク1つを裏にして、相手の戦場のパワー1000以下のイジン1体か、相手の戦場のハイケイ1つを指定して発動できる。そのイジンかハイケイを破壊する。&quot;,&quot;legacyText&quot;:&quot;1ドローする&quot;,&quot;imageUrl&quot;:&quot;https://one-draw.jp/ijinden/cardlist/003/card/03_013.png&quot;,&quot;expansion&quot;:35,&quot;rarity&quot;:1,&quot;type&quot;:1,&quot;level&quot;:2,&quot;color&quot;:1,&quot;term&quot;:0,&quot;trait&quot;:0,&quot;legacy&quot;:4,&quot;orderTable&quot;:241,&quot;orderDeck&quot;:29}," calcext:value-type="string">
            <text:p>{"id":"3-13","name":"平賀源内","kana":"ひらがげんない","traitText":null,"ruleText":"戦場に置かれたとき、自分の魔力ゾーンのマリョク1つを裏にして、相手の戦場のパワー1000以下のイジン1体か、相手の戦場のハイケイ1つを指定して発動できる。そのイジンかハイケイを破壊する。","legacyText":"1ドローする","imageUrl":"https://one-draw.jp/ijinden/cardlist/003/card/03_013.png","expansion":35,"rarity":1,"type":1,"level":2,"color":1,"term":0,"trait":0,"legacy":4,"orderTable":241,"orderDeck":29},</text:p>
          </table:table-cell>
          <table:table-cell table:number-columns-repeated="16347"/>
        </table:table-row>
        <table:table-row table:style-name="ro2">
          <table:table-cell office:value-type="float" office:value="242" calcext:value-type="float">
            <text:p>242</text:p>
          </table:table-cell>
          <table:table-cell office:value-type="float" office:value="72" calcext:value-type="float">
            <text:p>72</text:p>
          </table:table-cell>
          <table:table-cell office:value-type="string" calcext:value-type="string">
            <text:p>3-14</text:p>
          </table:table-cell>
          <table:table-cell office:value-type="float" office:value="14" calcext:value-type="float">
            <text:p>14</text:p>
          </table:table-cell>
          <table:table-cell office:value-type="string" calcext:value-type="string">
            <text:p>ジョージ・スチーブンソン</text:p>
          </table:table-cell>
          <table:table-cell office:value-type="string" calcext:value-type="string">
            <text:p>じょーじすちーぶんそん</text:p>
          </table:table-cell>
          <table:table-cell office:value-type="string" calcext:value-type="string">
            <text:p>第３弾ブースターパック</text:p>
          </table:table-cell>
          <table:table-cell table:formula="of:=VLOOKUP([.G243];[$収録番号.$A$1:$収録番号.$B$9];2;0)" office:value-type="float" office:value="35" calcext:value-type="float">
            <text:p>35</text:p>
          </table:table-cell>
          <table:table-cell office:value-type="string" calcext:value-type="string">
            <text:p>N</text:p>
          </table:table-cell>
          <table:table-cell table:formula="of:=VLOOKUP([.I243];[$レアリティ番号.$A$1:$レアリティ番号.$B$4];2;0)" office:value-type="float" office:value="1" calcext:value-type="float">
            <text:p>1</text:p>
          </table:table-cell>
          <table:table-cell office:value-type="string" calcext:value-type="string">
            <text:p>イジン</text:p>
          </table:table-cell>
          <table:table-cell table:formula="of:=VLOOKUP([.K243];[$種類番号.$A$1:$種類番号.$B$4];2;0)" office:value-type="float" office:value="1" calcext:value-type="float">
            <text:p>1</text:p>
          </table:table-cell>
          <table:table-cell office:value-type="string" calcext:value-type="string">
            <text:p>赤</text:p>
          </table:table-cell>
          <table:table-cell table:formula="of:=VLOOKUP([.M243];[$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3];[$特性番号.$A$1:$特性番号.$B$8];2;0);0)" office:value-type="float" office:value="0" calcext:value-type="float">
            <text:p>0</text:p>
          </table:table-cell>
          <table:table-cell office:value-type="string" calcext:value-type="string">
            <text:p>戦場に置かれたとき、自分の魔力ゾーンの裏のカード1つを手札に戻して発動できる。マリョク配置権+1する。</text:p>
          </table:table-cell>
          <table:table-cell table:style-name="ce8" office:value-type="string" calcext:value-type="string">
            <text:p>1ドローする</text:p>
          </table:table-cell>
          <table:table-cell table:formula="of:=IFERROR(VLOOKUP([.$V243];[$遺業能力番号.$A$1:$遺業能力番号.$B$9];2;0);0)" office:value-type="float" office:value="4" calcext:value-type="float">
            <text:p>4</text:p>
          </table:table-cell>
          <table:table-cell office:value-type="string" calcext:value-type="string">
            <text:p>https://one-draw.jp/ijinden/cardlist/003/card/03_014.png</text:p>
          </table:table-cell>
          <table:table-cell table:formula="of:=CONCATENATE([$JSON.$A$1];[.$C243];[$JSON.$B$1];[.$E243];[$JSON.$C$1];[.$F243];[$JSON.$D$1];IF(ISNA([.$S243]);&quot;null&quot;;&quot;&quot;&quot;&quot;&amp;[.$S243]&amp;&quot;&quot;&quot;&quot;);[$JSON.$E$1];[.$U243];[$JSON.$F$1];IF(ISNA([.$V243]);&quot;null&quot;;&quot;&quot;&quot;&quot;&amp;[.$V243]&amp;&quot;&quot;&quot;&quot;);[$JSON.$G$1];[.$X243];[$JSON.$H$1];[.$H243];[$JSON.$I$1];[.J243];[$JSON.$J$1];[.$L243];[$JSON.$K$1];[.$O243];[$JSON.$L$1];[.$N243];[$JSON.$M$1];[.$R243];[$JSON.$N$1];[.$T243];[$JSON.$O$1];[.$W243];[$JSON.$P$1];[.$A243];[$JSON.$Q$1];[.$B243];[$JSON.$R$1])" office:value-type="string" office:string-value="{&quot;id&quot;:&quot;3-14&quot;,&quot;name&quot;:&quot;ジョージ・スチーブンソン&quot;,&quot;kana&quot;:&quot;じょーじすちーぶんそん&quot;,&quot;traitText&quot;:null,&quot;ruleText&quot;:&quot;戦場に置かれたとき、自分の魔力ゾーンの裏のカード1つを手札に戻して発動できる。マリョク配置権+1する。&quot;,&quot;legacyText&quot;:&quot;1ドローする&quot;,&quot;imageUrl&quot;:&quot;https://one-draw.jp/ijinden/cardlist/003/card/03_014.png&quot;,&quot;expansion&quot;:35,&quot;rarity&quot;:1,&quot;type&quot;:1,&quot;level&quot;:3,&quot;color&quot;:1,&quot;term&quot;:0,&quot;trait&quot;:0,&quot;legacy&quot;:4,&quot;orderTable&quot;:242,&quot;orderDeck&quot;:72}," calcext:value-type="string">
            <text:p>{"id":"3-14","name":"ジョージ・スチーブンソン","kana":"じょーじすちーぶんそん","traitText":null,"ruleText":"戦場に置かれたとき、自分の魔力ゾーンの裏のカード1つを手札に戻して発動できる。マリョク配置権+1する。","legacyText":"1ドローする","imageUrl":"https://one-draw.jp/ijinden/cardlist/003/card/03_014.png","expansion":35,"rarity":1,"type":1,"level":3,"color":1,"term":0,"trait":0,"legacy":4,"orderTable":242,"orderDeck":72},</text:p>
          </table:table-cell>
          <table:table-cell table:number-columns-repeated="16347"/>
        </table:table-row>
        <table:table-row table:style-name="ro2">
          <table:table-cell office:value-type="float" office:value="243" calcext:value-type="float">
            <text:p>243</text:p>
          </table:table-cell>
          <table:table-cell office:value-type="float" office:value="151" calcext:value-type="float">
            <text:p>151</text:p>
          </table:table-cell>
          <table:table-cell office:value-type="string" calcext:value-type="string">
            <text:p>3-15</text:p>
          </table:table-cell>
          <table:table-cell office:value-type="float" office:value="15" calcext:value-type="float">
            <text:p>15</text:p>
          </table:table-cell>
          <table:table-cell office:value-type="string" calcext:value-type="string">
            <text:p>淀殿</text:p>
          </table:table-cell>
          <table:table-cell office:value-type="string" calcext:value-type="string">
            <text:p>よどどの</text:p>
          </table:table-cell>
          <table:table-cell office:value-type="string" calcext:value-type="string">
            <text:p>第３弾ブースターパック</text:p>
          </table:table-cell>
          <table:table-cell table:formula="of:=VLOOKUP([.G244];[$収録番号.$A$1:$収録番号.$B$9];2;0)" office:value-type="float" office:value="35" calcext:value-type="float">
            <text:p>35</text:p>
          </table:table-cell>
          <table:table-cell office:value-type="string" calcext:value-type="string">
            <text:p>R</text:p>
          </table:table-cell>
          <table:table-cell table:formula="of:=VLOOKUP([.I244];[$レアリティ番号.$A$1:$レアリティ番号.$B$4];2;0)" office:value-type="float" office:value="2" calcext:value-type="float">
            <text:p>2</text:p>
          </table:table-cell>
          <table:table-cell office:value-type="string" calcext:value-type="string">
            <text:p>イジン</text:p>
          </table:table-cell>
          <table:table-cell table:formula="of:=VLOOKUP([.K244];[$種類番号.$A$1:$種類番号.$B$4];2;0)" office:value-type="float" office:value="1" calcext:value-type="float">
            <text:p>1</text:p>
          </table:table-cell>
          <table:table-cell office:value-type="string" calcext:value-type="string">
            <text:p>赤</text:p>
          </table:table-cell>
          <table:table-cell table:formula="of:=VLOOKUP([.M244];[$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4];[$特性番号.$A$1:$特性番号.$B$8];2;0);0)" office:value-type="float" office:value="0" calcext:value-type="float">
            <text:p>0</text:p>
          </table:table-cell>
          <table:table-cell office:value-type="string" calcext:value-type="string">
            <text:p>自分が1体だけでアタックしたとき、戦場のハイケイ3つまでを指定して発動できる。それらのハイケイすべてを破壊する。¶カードが魔力ゾーンに5つ以上ある間、相手の墓地のハイケイは、能力によって墓地を離れない。</text:p>
          </table:table-cell>
          <table:table-cell table:style-name="ce8" office:value-type="string" calcext:value-type="string">
            <text:p>1ドローする</text:p>
          </table:table-cell>
          <table:table-cell table:formula="of:=IFERROR(VLOOKUP([.$V244];[$遺業能力番号.$A$1:$遺業能力番号.$B$9];2;0);0)" office:value-type="float" office:value="4" calcext:value-type="float">
            <text:p>4</text:p>
          </table:table-cell>
          <table:table-cell office:value-type="string" calcext:value-type="string">
            <text:p>https://one-draw.jp/ijinden/cardlist/003/card/03_015.png</text:p>
          </table:table-cell>
          <table:table-cell table:formula="of:=CONCATENATE([$JSON.$A$1];[.$C244];[$JSON.$B$1];[.$E244];[$JSON.$C$1];[.$F244];[$JSON.$D$1];IF(ISNA([.$S244]);&quot;null&quot;;&quot;&quot;&quot;&quot;&amp;[.$S244]&amp;&quot;&quot;&quot;&quot;);[$JSON.$E$1];[.$U244];[$JSON.$F$1];IF(ISNA([.$V244]);&quot;null&quot;;&quot;&quot;&quot;&quot;&amp;[.$V244]&amp;&quot;&quot;&quot;&quot;);[$JSON.$G$1];[.$X244];[$JSON.$H$1];[.$H244];[$JSON.$I$1];[.J244];[$JSON.$J$1];[.$L244];[$JSON.$K$1];[.$O244];[$JSON.$L$1];[.$N244];[$JSON.$M$1];[.$R244];[$JSON.$N$1];[.$T244];[$JSON.$O$1];[.$W244];[$JSON.$P$1];[.$A244];[$JSON.$Q$1];[.$B244];[$JSON.$R$1])" office:value-type="string" office:string-value="{&quot;id&quot;:&quot;3-15&quot;,&quot;name&quot;:&quot;淀殿&quot;,&quot;kana&quot;:&quot;よどどの&quot;,&quot;traitText&quot;:null,&quot;ruleText&quot;:&quot;自分が1体だけでアタックしたとき、戦場のハイケイ3つまでを指定して発動できる。それらのハイケイすべてを破壊する。¶カードが魔力ゾーンに5つ以上ある間、相手の墓地のハイケイは、能力によって墓地を離れない。&quot;,&quot;legacyText&quot;:&quot;1ドローする&quot;,&quot;imageUrl&quot;:&quot;https://one-draw.jp/ijinden/cardlist/003/card/03_015.png&quot;,&quot;expansion&quot;:35,&quot;rarity&quot;:2,&quot;type&quot;:1,&quot;level&quot;:5,&quot;color&quot;:1,&quot;term&quot;:0,&quot;trait&quot;:0,&quot;legacy&quot;:4,&quot;orderTable&quot;:243,&quot;orderDeck&quot;:151}," calcext:value-type="string">
            <text:p>{"id":"3-15","name":"淀殿","kana":"よどどの","traitText":null,"ruleText":"自分が1体だけでアタックしたとき、戦場のハイケイ3つまでを指定して発動できる。それらのハイケイすべてを破壊する。¶カードが魔力ゾーンに5つ以上ある間、相手の墓地のハイケイは、能力によって墓地を離れない。","legacyText":"1ドローする","imageUrl":"https://one-draw.jp/ijinden/cardlist/003/card/03_015.png","expansion":35,"rarity":2,"type":1,"level":5,"color":1,"term":0,"trait":0,"legacy":4,"orderTable":243,"orderDeck":151},</text:p>
          </table:table-cell>
          <table:table-cell table:number-columns-repeated="16347"/>
        </table:table-row>
        <table:table-row table:style-name="ro2">
          <table:table-cell office:value-type="float" office:value="244" calcext:value-type="float">
            <text:p>244</text:p>
          </table:table-cell>
          <table:table-cell office:value-type="float" office:value="5" calcext:value-type="float">
            <text:p>5</text:p>
          </table:table-cell>
          <table:table-cell office:value-type="string" calcext:value-type="string">
            <text:p>3-16</text:p>
          </table:table-cell>
          <table:table-cell office:value-type="float" office:value="16" calcext:value-type="float">
            <text:p>16</text:p>
          </table:table-cell>
          <table:table-cell office:value-type="string" calcext:value-type="string">
            <text:p>ジョージ・ワシントン</text:p>
          </table:table-cell>
          <table:table-cell office:value-type="string" calcext:value-type="string">
            <text:p>じょーじわしんとん</text:p>
          </table:table-cell>
          <table:table-cell office:value-type="string" calcext:value-type="string">
            <text:p>第３弾ブースターパック</text:p>
          </table:table-cell>
          <table:table-cell table:formula="of:=VLOOKUP([.G245];[$収録番号.$A$1:$収録番号.$B$9];2;0)" office:value-type="float" office:value="35" calcext:value-type="float">
            <text:p>35</text:p>
          </table:table-cell>
          <table:table-cell office:value-type="string" calcext:value-type="string">
            <text:p>R</text:p>
          </table:table-cell>
          <table:table-cell table:formula="of:=VLOOKUP([.I245];[$レアリティ番号.$A$1:$レアリティ番号.$B$4];2;0)" office:value-type="float" office:value="2" calcext:value-type="float">
            <text:p>2</text:p>
          </table:table-cell>
          <table:table-cell office:value-type="string" calcext:value-type="string">
            <text:p>イジン</text:p>
          </table:table-cell>
          <table:table-cell table:formula="of:=VLOOKUP([.K245];[$種類番号.$A$1:$種類番号.$B$4];2;0)" office:value-type="float" office:value="1" calcext:value-type="float">
            <text:p>1</text:p>
          </table:table-cell>
          <table:table-cell office:value-type="string" calcext:value-type="string">
            <text:p>赤</text:p>
          </table:table-cell>
          <table:table-cell table:formula="of:=VLOOKUP([.M245];[$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5];[$特性番号.$A$1:$特性番号.$B$8];2;0);0)" office:value-type="float" office:value="0" calcext:value-type="float">
            <text:p>0</text:p>
          </table:table-cell>
          <table:table-cell office:value-type="string" calcext:value-type="string">
            <text:p>これが戦場にいる間、自分の戦場の『アタック+』能力を持つイジンは「即応」を得る。</text:p>
          </table:table-cell>
          <table:table-cell table:style-name="ce8" table:formula="of:=NA()" office:value-type="string" office:string-value="" calcext:value-type="error">
            <text:p>#N/A</text:p>
          </table:table-cell>
          <table:table-cell table:formula="of:=IFERROR(VLOOKUP([.$V245];[$遺業能力番号.$A$1:$遺業能力番号.$B$9];2;0);0)" office:value-type="float" office:value="0" calcext:value-type="float">
            <text:p>0</text:p>
          </table:table-cell>
          <table:table-cell office:value-type="string" calcext:value-type="string">
            <text:p>https://one-draw.jp/ijinden/cardlist/003/card/03_016.png</text:p>
          </table:table-cell>
          <table:table-cell table:formula="of:=CONCATENATE([$JSON.$A$1];[.$C245];[$JSON.$B$1];[.$E245];[$JSON.$C$1];[.$F245];[$JSON.$D$1];IF(ISNA([.$S245]);&quot;null&quot;;&quot;&quot;&quot;&quot;&amp;[.$S245]&amp;&quot;&quot;&quot;&quot;);[$JSON.$E$1];[.$U245];[$JSON.$F$1];IF(ISNA([.$V245]);&quot;null&quot;;&quot;&quot;&quot;&quot;&amp;[.$V245]&amp;&quot;&quot;&quot;&quot;);[$JSON.$G$1];[.$X245];[$JSON.$H$1];[.$H245];[$JSON.$I$1];[.J245];[$JSON.$J$1];[.$L245];[$JSON.$K$1];[.$O245];[$JSON.$L$1];[.$N245];[$JSON.$M$1];[.$R245];[$JSON.$N$1];[.$T245];[$JSON.$O$1];[.$W245];[$JSON.$P$1];[.$A245];[$JSON.$Q$1];[.$B245];[$JSON.$R$1])" office:value-type="string" office:string-value="{&quot;id&quot;:&quot;3-16&quot;,&quot;name&quot;:&quot;ジョージ・ワシントン&quot;,&quot;kana&quot;:&quot;じょーじわしんとん&quot;,&quot;traitText&quot;:null,&quot;ruleText&quot;:&quot;これが戦場にいる間、自分の戦場の『アタック+』能力を持つイジンは「即応」を得る。&quot;,&quot;legacyText&quot;:null,&quot;imageUrl&quot;:&quot;https://one-draw.jp/ijinden/cardlist/003/card/03_016.png&quot;,&quot;expansion&quot;:35,&quot;rarity&quot;:2,&quot;type&quot;:1,&quot;level&quot;:1,&quot;color&quot;:1,&quot;term&quot;:0,&quot;trait&quot;:0,&quot;legacy&quot;:0,&quot;orderTable&quot;:244,&quot;orderDeck&quot;:5}," calcext:value-type="string">
            <text:p>{"id":"3-16","name":"ジョージ・ワシントン","kana":"じょーじわしんとん","traitText":null,"ruleText":"これが戦場にいる間、自分の戦場の『アタック+』能力を持つイジンは「即応」を得る。","legacyText":null,"imageUrl":"https://one-draw.jp/ijinden/cardlist/003/card/03_016.png","expansion":35,"rarity":2,"type":1,"level":1,"color":1,"term":0,"trait":0,"legacy":0,"orderTable":244,"orderDeck":5},</text:p>
          </table:table-cell>
          <table:table-cell table:number-columns-repeated="16347"/>
        </table:table-row>
        <table:table-row table:style-name="ro2">
          <table:table-cell office:value-type="float" office:value="245" calcext:value-type="float">
            <text:p>245</text:p>
          </table:table-cell>
          <table:table-cell office:value-type="float" office:value="219" calcext:value-type="float">
            <text:p>219</text:p>
          </table:table-cell>
          <table:table-cell office:value-type="string" calcext:value-type="string">
            <text:p>3-17</text:p>
          </table:table-cell>
          <table:table-cell office:value-type="float" office:value="17" calcext:value-type="float">
            <text:p>17</text:p>
          </table:table-cell>
          <table:table-cell office:value-type="string" calcext:value-type="string">
            <text:p>大塩平八郎</text:p>
          </table:table-cell>
          <table:table-cell office:value-type="string" calcext:value-type="string">
            <text:p>おおしおへいはちろう</text:p>
          </table:table-cell>
          <table:table-cell office:value-type="string" calcext:value-type="string">
            <text:p>第３弾ブースターパック</text:p>
          </table:table-cell>
          <table:table-cell table:formula="of:=VLOOKUP([.G246];[$収録番号.$A$1:$収録番号.$B$9];2;0)" office:value-type="float" office:value="35" calcext:value-type="float">
            <text:p>35</text:p>
          </table:table-cell>
          <table:table-cell office:value-type="string" calcext:value-type="string">
            <text:p>N</text:p>
          </table:table-cell>
          <table:table-cell table:formula="of:=VLOOKUP([.I246];[$レアリティ番号.$A$1:$レアリティ番号.$B$4];2;0)" office:value-type="float" office:value="1" calcext:value-type="float">
            <text:p>1</text:p>
          </table:table-cell>
          <table:table-cell office:value-type="string" calcext:value-type="string">
            <text:p>イジン</text:p>
          </table:table-cell>
          <table:table-cell table:formula="of:=VLOOKUP([.K246];[$種類番号.$A$1:$種類番号.$B$4];2;0)" office:value-type="float" office:value="1" calcext:value-type="float">
            <text:p>1</text:p>
          </table:table-cell>
          <table:table-cell office:value-type="string" calcext:value-type="string">
            <text:p>赤</text:p>
          </table:table-cell>
          <table:table-cell table:formula="of:=VLOOKUP([.M246];[$色番号.$A$1:$色番号.$B$10];2;0)" office:value-type="float" office:value="1" calcext:value-type="float">
            <text:p>1</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決起</text:p>
          </table:table-cell>
          <table:table-cell table:formula="of:=IFERROR(VLOOKUP([.$Q246];[$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S246];[$特性番号.$A$1:$特性番号.$B$8];2;0);0)" office:value-type="float" office:value="0" calcext:value-type="float">
            <text:p>0</text:p>
          </table:table-cell>
          <table:table-cell office:value-type="string" calcext:value-type="string">
            <text:p>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text:p>
          </table:table-cell>
          <table:table-cell table:style-name="ce8" office:value-type="string" calcext:value-type="string">
            <text:p>1ドローする</text:p>
          </table:table-cell>
          <table:table-cell table:formula="of:=IFERROR(VLOOKUP([.$V246];[$遺業能力番号.$A$1:$遺業能力番号.$B$9];2;0);0)" office:value-type="float" office:value="4" calcext:value-type="float">
            <text:p>4</text:p>
          </table:table-cell>
          <table:table-cell office:value-type="string" calcext:value-type="string">
            <text:p>https://one-draw.jp/ijinden/cardlist/003/card/03_017.png</text:p>
          </table:table-cell>
          <table:table-cell table:formula="of:=CONCATENATE([$JSON.$A$1];[.$C246];[$JSON.$B$1];[.$E246];[$JSON.$C$1];[.$F246];[$JSON.$D$1];IF(ISNA([.$S246]);&quot;null&quot;;&quot;&quot;&quot;&quot;&amp;[.$S246]&amp;&quot;&quot;&quot;&quot;);[$JSON.$E$1];[.$U246];[$JSON.$F$1];IF(ISNA([.$V246]);&quot;null&quot;;&quot;&quot;&quot;&quot;&amp;[.$V246]&amp;&quot;&quot;&quot;&quot;);[$JSON.$G$1];[.$X246];[$JSON.$H$1];[.$H246];[$JSON.$I$1];[.J246];[$JSON.$J$1];[.$L246];[$JSON.$K$1];[.$O246];[$JSON.$L$1];[.$N246];[$JSON.$M$1];[.$R246];[$JSON.$N$1];[.$T246];[$JSON.$O$1];[.$W246];[$JSON.$P$1];[.$A246];[$JSON.$Q$1];[.$B246];[$JSON.$R$1])" office:value-type="string" office:string-value="{&quot;id&quot;:&quot;3-17&quot;,&quot;name&quot;:&quot;大塩平八郎&quot;,&quot;kana&quot;:&quot;おおしおへいはちろう&quot;,&quot;traitText&quot;:null,&quot;ruleText&quot;:&quot;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quot;,&quot;legacyText&quot;:&quot;1ドローする&quot;,&quot;imageUrl&quot;:&quot;https://one-draw.jp/ijinden/cardlist/003/card/03_017.png&quot;,&quot;expansion&quot;:35,&quot;rarity&quot;:1,&quot;type&quot;:1,&quot;level&quot;:8,&quot;color&quot;:1,&quot;term&quot;:4,&quot;trait&quot;:0,&quot;legacy&quot;:4,&quot;orderTable&quot;:245,&quot;orderDeck&quot;:219}," calcext:value-type="string">
            <text:p>{"id":"3-17","name":"大塩平八郎","kana":"おおしおへいはちろう","traitText":null,"ruleText":"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legacyText":"1ドローする","imageUrl":"https://one-draw.jp/ijinden/cardlist/003/card/03_017.png","expansion":35,"rarity":1,"type":1,"level":8,"color":1,"term":4,"trait":0,"legacy":4,"orderTable":245,"orderDeck":219},</text:p>
          </table:table-cell>
          <table:table-cell table:number-columns-repeated="16347"/>
        </table:table-row>
        <table:table-row table:style-name="ro2">
          <table:table-cell office:value-type="float" office:value="246" calcext:value-type="float">
            <text:p>246</text:p>
          </table:table-cell>
          <table:table-cell office:value-type="float" office:value="183" calcext:value-type="float">
            <text:p>183</text:p>
          </table:table-cell>
          <table:table-cell office:value-type="string" calcext:value-type="string">
            <text:p>3-18</text:p>
          </table:table-cell>
          <table:table-cell office:value-type="float" office:value="18" calcext:value-type="float">
            <text:p>18</text:p>
          </table:table-cell>
          <table:table-cell office:value-type="string" calcext:value-type="string">
            <text:p>水野忠邦</text:p>
          </table:table-cell>
          <table:table-cell office:value-type="string" calcext:value-type="string">
            <text:p>みずのただくに</text:p>
          </table:table-cell>
          <table:table-cell office:value-type="string" calcext:value-type="string">
            <text:p>第３弾ブースターパック</text:p>
          </table:table-cell>
          <table:table-cell table:formula="of:=VLOOKUP([.G247];[$収録番号.$A$1:$収録番号.$B$9];2;0)" office:value-type="float" office:value="35" calcext:value-type="float">
            <text:p>35</text:p>
          </table:table-cell>
          <table:table-cell office:value-type="string" calcext:value-type="string">
            <text:p>N</text:p>
          </table:table-cell>
          <table:table-cell table:formula="of:=VLOOKUP([.I247];[$レアリティ番号.$A$1:$レアリティ番号.$B$4];2;0)" office:value-type="float" office:value="1" calcext:value-type="float">
            <text:p>1</text:p>
          </table:table-cell>
          <table:table-cell office:value-type="string" calcext:value-type="string">
            <text:p>イジン</text:p>
          </table:table-cell>
          <table:table-cell table:formula="of:=VLOOKUP([.K247];[$種類番号.$A$1:$種類番号.$B$4];2;0)" office:value-type="float" office:value="1" calcext:value-type="float">
            <text:p>1</text:p>
          </table:table-cell>
          <table:table-cell office:value-type="string" calcext:value-type="string">
            <text:p>赤</text:p>
          </table:table-cell>
          <table:table-cell table:formula="of:=VLOOKUP([.M247];[$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7];[$特性番号.$A$1:$特性番号.$B$8];2;0);0)" office:value-type="float" office:value="0" calcext:value-type="float">
            <text:p>0</text:p>
          </table:table-cell>
          <table:table-cell office:value-type="string" calcext:value-type="string">
            <text:p>これのイジン召喚に際し、これのレベルは、相手の魔力ゾーンのマリョク1つにつき1だけ下がる。¶これが戦場にいる間、マリョク配置権は、戦場の能力によって増えない。</text:p>
          </table:table-cell>
          <table:table-cell table:style-name="ce8" table:formula="of:=NA()" office:value-type="string" office:string-value="" calcext:value-type="error">
            <text:p>#N/A</text:p>
          </table:table-cell>
          <table:table-cell table:formula="of:=IFERROR(VLOOKUP([.$V247];[$遺業能力番号.$A$1:$遺業能力番号.$B$9];2;0);0)" office:value-type="float" office:value="0" calcext:value-type="float">
            <text:p>0</text:p>
          </table:table-cell>
          <table:table-cell office:value-type="string" calcext:value-type="string">
            <text:p>https://one-draw.jp/ijinden/cardlist/003/card/03_018.png</text:p>
          </table:table-cell>
          <table:table-cell table:formula="of:=CONCATENATE([$JSON.$A$1];[.$C247];[$JSON.$B$1];[.$E247];[$JSON.$C$1];[.$F247];[$JSON.$D$1];IF(ISNA([.$S247]);&quot;null&quot;;&quot;&quot;&quot;&quot;&amp;[.$S247]&amp;&quot;&quot;&quot;&quot;);[$JSON.$E$1];[.$U247];[$JSON.$F$1];IF(ISNA([.$V247]);&quot;null&quot;;&quot;&quot;&quot;&quot;&amp;[.$V247]&amp;&quot;&quot;&quot;&quot;);[$JSON.$G$1];[.$X247];[$JSON.$H$1];[.$H247];[$JSON.$I$1];[.J247];[$JSON.$J$1];[.$L247];[$JSON.$K$1];[.$O247];[$JSON.$L$1];[.$N247];[$JSON.$M$1];[.$R247];[$JSON.$N$1];[.$T247];[$JSON.$O$1];[.$W247];[$JSON.$P$1];[.$A247];[$JSON.$Q$1];[.$B247];[$JSON.$R$1])" office:value-type="string" office:string-value="{&quot;id&quot;:&quot;3-18&quot;,&quot;name&quot;:&quot;水野忠邦&quot;,&quot;kana&quot;:&quot;みずのただくに&quot;,&quot;traitText&quot;:null,&quot;ruleText&quot;:&quot;これのイジン召喚に際し、これのレベルは、相手の魔力ゾーンのマリョク1つにつき1だけ下がる。¶これが戦場にいる間、マリョク配置権は、戦場の能力によって増えない。&quot;,&quot;legacyText&quot;:null,&quot;imageUrl&quot;:&quot;https://one-draw.jp/ijinden/cardlist/003/card/03_018.png&quot;,&quot;expansion&quot;:35,&quot;rarity&quot;:1,&quot;type&quot;:1,&quot;level&quot;:6,&quot;color&quot;:1,&quot;term&quot;:0,&quot;trait&quot;:0,&quot;legacy&quot;:0,&quot;orderTable&quot;:246,&quot;orderDeck&quot;:183}," calcext:value-type="string">
            <text:p>{"id":"3-18","name":"水野忠邦","kana":"みずのただくに","traitText":null,"ruleText":"これのイジン召喚に際し、これのレベルは、相手の魔力ゾーンのマリョク1つにつき1だけ下がる。¶これが戦場にいる間、マリョク配置権は、戦場の能力によって増えない。","legacyText":null,"imageUrl":"https://one-draw.jp/ijinden/cardlist/003/card/03_018.png","expansion":35,"rarity":1,"type":1,"level":6,"color":1,"term":0,"trait":0,"legacy":0,"orderTable":246,"orderDeck":183},</text:p>
          </table:table-cell>
          <table:table-cell table:number-columns-repeated="16347"/>
        </table:table-row>
        <table:table-row table:style-name="ro2">
          <table:table-cell office:value-type="float" office:value="247" calcext:value-type="float">
            <text:p>247</text:p>
          </table:table-cell>
          <table:table-cell office:value-type="float" office:value="220" calcext:value-type="float">
            <text:p>220</text:p>
          </table:table-cell>
          <table:table-cell office:value-type="string" calcext:value-type="string">
            <text:p>3-19</text:p>
          </table:table-cell>
          <table:table-cell office:value-type="float" office:value="19" calcext:value-type="float">
            <text:p>19</text:p>
          </table:table-cell>
          <table:table-cell office:value-type="string" calcext:value-type="string">
            <text:p>伊達政宗</text:p>
          </table:table-cell>
          <table:table-cell office:value-type="string" calcext:value-type="string">
            <text:p>だてまさむね</text:p>
          </table:table-cell>
          <table:table-cell office:value-type="string" calcext:value-type="string">
            <text:p>第３弾ブースターパック</text:p>
          </table:table-cell>
          <table:table-cell table:formula="of:=VLOOKUP([.G248];[$収録番号.$A$1:$収録番号.$B$9];2;0)" office:value-type="float" office:value="35" calcext:value-type="float">
            <text:p>35</text:p>
          </table:table-cell>
          <table:table-cell office:value-type="string" calcext:value-type="string">
            <text:p>R</text:p>
          </table:table-cell>
          <table:table-cell table:formula="of:=VLOOKUP([.I248];[$レアリティ番号.$A$1:$レアリティ番号.$B$4];2;0)" office:value-type="float" office:value="2" calcext:value-type="float">
            <text:p>2</text:p>
          </table:table-cell>
          <table:table-cell office:value-type="string" calcext:value-type="string">
            <text:p>イジン</text:p>
          </table:table-cell>
          <table:table-cell table:formula="of:=VLOOKUP([.K248];[$種類番号.$A$1:$種類番号.$B$4];2;0)" office:value-type="float" office:value="1" calcext:value-type="float">
            <text:p>1</text:p>
          </table:table-cell>
          <table:table-cell office:value-type="string" calcext:value-type="string">
            <text:p>青</text:p>
          </table:table-cell>
          <table:table-cell table:formula="of:=VLOOKUP([.M248];[$色番号.$A$1:$色番号.$B$10];2;0)" office:value-type="float" office:value="2" calcext:value-type="float">
            <text:p>2</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8];[$能力語番号.$A$1:$能力語番号.$B$10];2;0);0)" office:value-type="float" office:value="0" calcext:value-type="float">
            <text:p>0</text:p>
          </table:table-cell>
          <table:table-cell office:value-type="string" calcext:value-type="string">
            <text:p>剣術</text:p>
          </table:table-cell>
          <table:table-cell table:formula="of:=IFERROR(VLOOKUP([.$S248];[$特性番号.$A$1:$特性番号.$B$8];2;0);0)" office:value-type="float" office:value="1" calcext:value-type="float">
            <text:p>1</text:p>
          </table:table-cell>
          <table:table-cell office:value-type="string" calcext:value-type="string">
            <text:p>装備していない間、ブロッカーになれない。¶戦場の「剣術」イジン1体につき「ブロック+1000」を得る。</text:p>
          </table:table-cell>
          <table:table-cell table:style-name="ce8" office:value-type="string" calcext:value-type="string">
            <text:p>反魂</text:p>
          </table:table-cell>
          <table:table-cell table:formula="of:=IFERROR(VLOOKUP([.$V248];[$遺業能力番号.$A$1:$遺業能力番号.$B$9];2;0);0)" office:value-type="float" office:value="6" calcext:value-type="float">
            <text:p>6</text:p>
          </table:table-cell>
          <table:table-cell office:value-type="string" calcext:value-type="string">
            <text:p>https://one-draw.jp/ijinden/cardlist/003/card/03_019.png</text:p>
          </table:table-cell>
          <table:table-cell table:formula="of:=CONCATENATE([$JSON.$A$1];[.$C248];[$JSON.$B$1];[.$E248];[$JSON.$C$1];[.$F248];[$JSON.$D$1];IF(ISNA([.$S248]);&quot;null&quot;;&quot;&quot;&quot;&quot;&amp;[.$S248]&amp;&quot;&quot;&quot;&quot;);[$JSON.$E$1];[.$U248];[$JSON.$F$1];IF(ISNA([.$V248]);&quot;null&quot;;&quot;&quot;&quot;&quot;&amp;[.$V248]&amp;&quot;&quot;&quot;&quot;);[$JSON.$G$1];[.$X248];[$JSON.$H$1];[.$H248];[$JSON.$I$1];[.J248];[$JSON.$J$1];[.$L248];[$JSON.$K$1];[.$O248];[$JSON.$L$1];[.$N248];[$JSON.$M$1];[.$R248];[$JSON.$N$1];[.$T248];[$JSON.$O$1];[.$W248];[$JSON.$P$1];[.$A248];[$JSON.$Q$1];[.$B248];[$JSON.$R$1])" office:value-type="string" office:string-value="{&quot;id&quot;:&quot;3-19&quot;,&quot;name&quot;:&quot;伊達政宗&quot;,&quot;kana&quot;:&quot;だてまさむね&quot;,&quot;traitText&quot;:&quot;剣術&quot;,&quot;ruleText&quot;:&quot;装備していない間、ブロッカーになれない。¶戦場の「剣術」イジン1体につき「ブロック+1000」を得る。&quot;,&quot;legacyText&quot;:&quot;反魂&quot;,&quot;imageUrl&quot;:&quot;https://one-draw.jp/ijinden/cardlist/003/card/03_019.png&quot;,&quot;expansion&quot;:35,&quot;rarity&quot;:2,&quot;type&quot;:1,&quot;level&quot;:8,&quot;color&quot;:2,&quot;term&quot;:0,&quot;trait&quot;:1,&quot;legacy&quot;:6,&quot;orderTable&quot;:247,&quot;orderDeck&quot;:220}," calcext:value-type="string">
            <text:p>{"id":"3-19","name":"伊達政宗","kana":"だてまさむね","traitText":"剣術","ruleText":"装備していない間、ブロッカーになれない。¶戦場の「剣術」イジン1体につき「ブロック+1000」を得る。","legacyText":"反魂","imageUrl":"https://one-draw.jp/ijinden/cardlist/003/card/03_019.png","expansion":35,"rarity":2,"type":1,"level":8,"color":2,"term":0,"trait":1,"legacy":6,"orderTable":247,"orderDeck":220},</text:p>
          </table:table-cell>
          <table:table-cell table:number-columns-repeated="16347"/>
        </table:table-row>
        <table:table-row table:style-name="ro2">
          <table:table-cell office:value-type="float" office:value="248" calcext:value-type="float">
            <text:p>248</text:p>
          </table:table-cell>
          <table:table-cell office:value-type="float" office:value="189" calcext:value-type="float">
            <text:p>189</text:p>
          </table:table-cell>
          <table:table-cell office:value-type="string" calcext:value-type="string">
            <text:p>3-20</text:p>
          </table:table-cell>
          <table:table-cell office:value-type="float" office:value="20" calcext:value-type="float">
            <text:p>20</text:p>
          </table:table-cell>
          <table:table-cell office:value-type="string" calcext:value-type="string">
            <text:p>バルトロメウ=ディアス</text:p>
          </table:table-cell>
          <table:table-cell office:value-type="string" calcext:value-type="string">
            <text:p>ばるとろめうでぃあす</text:p>
          </table:table-cell>
          <table:table-cell office:value-type="string" calcext:value-type="string">
            <text:p>第３弾ブースターパック</text:p>
          </table:table-cell>
          <table:table-cell table:formula="of:=VLOOKUP([.G249];[$収録番号.$A$1:$収録番号.$B$9];2;0)" office:value-type="float" office:value="35" calcext:value-type="float">
            <text:p>35</text:p>
          </table:table-cell>
          <table:table-cell office:value-type="string" calcext:value-type="string">
            <text:p>N</text:p>
          </table:table-cell>
          <table:table-cell table:formula="of:=VLOOKUP([.I249];[$レアリティ番号.$A$1:$レアリティ番号.$B$4];2;0)" office:value-type="float" office:value="1" calcext:value-type="float">
            <text:p>1</text:p>
          </table:table-cell>
          <table:table-cell office:value-type="string" calcext:value-type="string">
            <text:p>イジン</text:p>
          </table:table-cell>
          <table:table-cell table:formula="of:=VLOOKUP([.K249];[$種類番号.$A$1:$種類番号.$B$4];2;0)" office:value-type="float" office:value="1" calcext:value-type="float">
            <text:p>1</text:p>
          </table:table-cell>
          <table:table-cell office:value-type="string" calcext:value-type="string">
            <text:p>青</text:p>
          </table:table-cell>
          <table:table-cell table:formula="of:=VLOOKUP([.M249];[$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Q24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249];[$特性番号.$A$1:$特性番号.$B$8];2;0);0)" office:value-type="float" office:value="0" calcext:value-type="float">
            <text:p>0</text:p>
          </table:table-cell>
          <table:table-cell office:value-type="string" calcext:value-type="string">
            <text:p>航海 - アタッカーになったとき、戦場のイジン1体か、戦場のハイケイ1つを手札に戻す。</text:p>
          </table:table-cell>
          <table:table-cell table:style-name="ce8" table:formula="of:=NA()" office:value-type="string" office:string-value="" calcext:value-type="error">
            <text:p>#N/A</text:p>
          </table:table-cell>
          <table:table-cell table:formula="of:=IFERROR(VLOOKUP([.$V249];[$遺業能力番号.$A$1:$遺業能力番号.$B$9];2;0);0)" office:value-type="float" office:value="0" calcext:value-type="float">
            <text:p>0</text:p>
          </table:table-cell>
          <table:table-cell office:value-type="string" calcext:value-type="string">
            <text:p>https://one-draw.jp/ijinden/cardlist/003/card/03_020.png</text:p>
          </table:table-cell>
          <table:table-cell table:formula="of:=CONCATENATE([$JSON.$A$1];[.$C249];[$JSON.$B$1];[.$E249];[$JSON.$C$1];[.$F249];[$JSON.$D$1];IF(ISNA([.$S249]);&quot;null&quot;;&quot;&quot;&quot;&quot;&amp;[.$S249]&amp;&quot;&quot;&quot;&quot;);[$JSON.$E$1];[.$U249];[$JSON.$F$1];IF(ISNA([.$V249]);&quot;null&quot;;&quot;&quot;&quot;&quot;&amp;[.$V249]&amp;&quot;&quot;&quot;&quot;);[$JSON.$G$1];[.$X249];[$JSON.$H$1];[.$H249];[$JSON.$I$1];[.J249];[$JSON.$J$1];[.$L249];[$JSON.$K$1];[.$O249];[$JSON.$L$1];[.$N249];[$JSON.$M$1];[.$R249];[$JSON.$N$1];[.$T249];[$JSON.$O$1];[.$W249];[$JSON.$P$1];[.$A249];[$JSON.$Q$1];[.$B249];[$JSON.$R$1])" office:value-type="string" office:string-value="{&quot;id&quot;:&quot;3-20&quot;,&quot;name&quot;:&quot;バルトロメウ=ディアス&quot;,&quot;kana&quot;:&quot;ばるとろめうでぃあす&quot;,&quot;traitText&quot;:null,&quot;ruleText&quot;:&quot;航海 - アタッカーになったとき、戦場のイジン1体か、戦場のハイケイ1つを手札に戻す。&quot;,&quot;legacyText&quot;:null,&quot;imageUrl&quot;:&quot;https://one-draw.jp/ijinden/cardlist/003/card/03_020.png&quot;,&quot;expansion&quot;:35,&quot;rarity&quot;:1,&quot;type&quot;:1,&quot;level&quot;:6,&quot;color&quot;:2,&quot;term&quot;:1,&quot;trait&quot;:0,&quot;legacy&quot;:0,&quot;orderTable&quot;:248,&quot;orderDeck&quot;:189}," calcext:value-type="string">
            <text:p>{"id":"3-20","name":"バルトロメウ=ディアス","kana":"ばるとろめうでぃあす","traitText":null,"ruleText":"航海 - アタッカーになったとき、戦場のイジン1体か、戦場のハイケイ1つを手札に戻す。","legacyText":null,"imageUrl":"https://one-draw.jp/ijinden/cardlist/003/card/03_020.png","expansion":35,"rarity":1,"type":1,"level":6,"color":2,"term":1,"trait":0,"legacy":0,"orderTable":248,"orderDeck":189},</text:p>
          </table:table-cell>
          <table:table-cell table:number-columns-repeated="16347"/>
        </table:table-row>
        <table:table-row table:style-name="ro2">
          <table:table-cell office:value-type="float" office:value="249" calcext:value-type="float">
            <text:p>249</text:p>
          </table:table-cell>
          <table:table-cell office:value-type="float" office:value="9" calcext:value-type="float">
            <text:p>9</text:p>
          </table:table-cell>
          <table:table-cell office:value-type="string" calcext:value-type="string">
            <text:p>3-21</text:p>
          </table:table-cell>
          <table:table-cell office:value-type="float" office:value="21" calcext:value-type="float">
            <text:p>21</text:p>
          </table:table-cell>
          <table:table-cell office:value-type="string" calcext:value-type="string">
            <text:p>木戸孝允</text:p>
          </table:table-cell>
          <table:table-cell office:value-type="string" calcext:value-type="string">
            <text:p>きどたかよし</text:p>
          </table:table-cell>
          <table:table-cell office:value-type="string" calcext:value-type="string">
            <text:p>第３弾ブースターパック</text:p>
          </table:table-cell>
          <table:table-cell table:formula="of:=VLOOKUP([.G250];[$収録番号.$A$1:$収録番号.$B$9];2;0)" office:value-type="float" office:value="35" calcext:value-type="float">
            <text:p>35</text:p>
          </table:table-cell>
          <table:table-cell office:value-type="string" calcext:value-type="string">
            <text:p>N</text:p>
          </table:table-cell>
          <table:table-cell table:formula="of:=VLOOKUP([.I250];[$レアリティ番号.$A$1:$レアリティ番号.$B$4];2;0)" office:value-type="float" office:value="1" calcext:value-type="float">
            <text:p>1</text:p>
          </table:table-cell>
          <table:table-cell office:value-type="string" calcext:value-type="string">
            <text:p>イジン</text:p>
          </table:table-cell>
          <table:table-cell table:formula="of:=VLOOKUP([.K250];[$種類番号.$A$1:$種類番号.$B$4];2;0)" office:value-type="float" office:value="1" calcext:value-type="float">
            <text:p>1</text:p>
          </table:table-cell>
          <table:table-cell office:value-type="string" calcext:value-type="string">
            <text:p>青</text:p>
          </table:table-cell>
          <table:table-cell table:formula="of:=VLOOKUP([.M250];[$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50];[$能力語番号.$A$1:$能力語番号.$B$10];2;0);0)" office:value-type="float" office:value="0" calcext:value-type="float">
            <text:p>0</text:p>
          </table:table-cell>
          <table:table-cell office:value-type="string" calcext:value-type="string">
            <text:p>思想</text:p>
          </table:table-cell>
          <table:table-cell table:formula="of:=IFERROR(VLOOKUP([.$S250];[$特性番号.$A$1:$特性番号.$B$8];2;0);0)" office:value-type="float" office:value="8" calcext:value-type="float">
            <text:p>8</text:p>
          </table:table-cell>
          <table:table-cell office:value-type="string" calcext:value-type="string">
            <text:p>スタンド</text:p>
          </table:table-cell>
          <table:table-cell table:style-name="ce8" office:value-type="string" calcext:value-type="string">
            <text:p>1ドローする</text:p>
          </table:table-cell>
          <table:table-cell table:formula="of:=IFERROR(VLOOKUP([.$V250];[$遺業能力番号.$A$1:$遺業能力番号.$B$9];2;0);0)" office:value-type="float" office:value="4" calcext:value-type="float">
            <text:p>4</text:p>
          </table:table-cell>
          <table:table-cell office:value-type="string" calcext:value-type="string">
            <text:p>https://one-draw.jp/ijinden/cardlist/003/card/03_021.png</text:p>
          </table:table-cell>
          <table:table-cell table:formula="of:=CONCATENATE([$JSON.$A$1];[.$C250];[$JSON.$B$1];[.$E250];[$JSON.$C$1];[.$F250];[$JSON.$D$1];IF(ISNA([.$S250]);&quot;null&quot;;&quot;&quot;&quot;&quot;&amp;[.$S250]&amp;&quot;&quot;&quot;&quot;);[$JSON.$E$1];[.$U250];[$JSON.$F$1];IF(ISNA([.$V250]);&quot;null&quot;;&quot;&quot;&quot;&quot;&amp;[.$V250]&amp;&quot;&quot;&quot;&quot;);[$JSON.$G$1];[.$X250];[$JSON.$H$1];[.$H250];[$JSON.$I$1];[.J250];[$JSON.$J$1];[.$L250];[$JSON.$K$1];[.$O250];[$JSON.$L$1];[.$N250];[$JSON.$M$1];[.$R250];[$JSON.$N$1];[.$T250];[$JSON.$O$1];[.$W250];[$JSON.$P$1];[.$A250];[$JSON.$Q$1];[.$B250];[$JSON.$R$1])" office:value-type="string" office:string-value="{&quot;id&quot;:&quot;3-21&quot;,&quot;name&quot;:&quot;木戸孝允&quot;,&quot;kana&quot;:&quot;きどたかよし&quot;,&quot;traitText&quot;:&quot;思想&quot;,&quot;ruleText&quot;:&quot;スタンド&quot;,&quot;legacyText&quot;:&quot;1ドローする&quot;,&quot;imageUrl&quot;:&quot;https://one-draw.jp/ijinden/cardlist/003/card/03_021.png&quot;,&quot;expansion&quot;:35,&quot;rarity&quot;:1,&quot;type&quot;:1,&quot;level&quot;:1,&quot;color&quot;:2,&quot;term&quot;:0,&quot;trait&quot;:8,&quot;legacy&quot;:4,&quot;orderTable&quot;:249,&quot;orderDeck&quot;:9}," calcext:value-type="string">
            <text:p>{"id":"3-21","name":"木戸孝允","kana":"きどたかよし","traitText":"思想","ruleText":"スタンド","legacyText":"1ドローする","imageUrl":"https://one-draw.jp/ijinden/cardlist/003/card/03_021.png","expansion":35,"rarity":1,"type":1,"level":1,"color":2,"term":0,"trait":8,"legacy":4,"orderTable":249,"orderDeck":9},</text:p>
          </table:table-cell>
          <table:table-cell table:number-columns-repeated="16347"/>
        </table:table-row>
        <table:table-row table:style-name="ro2">
          <table:table-cell office:value-type="float" office:value="250" calcext:value-type="float">
            <text:p>250</text:p>
          </table:table-cell>
          <table:table-cell office:value-type="float" office:value="40" calcext:value-type="float">
            <text:p>40</text:p>
          </table:table-cell>
          <table:table-cell office:value-type="string" calcext:value-type="string">
            <text:p>3-22</text:p>
          </table:table-cell>
          <table:table-cell office:value-type="float" office:value="22" calcext:value-type="float">
            <text:p>22</text:p>
          </table:table-cell>
          <table:table-cell office:value-type="string" calcext:value-type="string">
            <text:p>高杉晋作</text:p>
          </table:table-cell>
          <table:table-cell office:value-type="string" calcext:value-type="string">
            <text:p>たかすぎしんさく</text:p>
          </table:table-cell>
          <table:table-cell office:value-type="string" calcext:value-type="string">
            <text:p>第３弾ブースターパック</text:p>
          </table:table-cell>
          <table:table-cell table:formula="of:=VLOOKUP([.G251];[$収録番号.$A$1:$収録番号.$B$9];2;0)" office:value-type="float" office:value="35" calcext:value-type="float">
            <text:p>35</text:p>
          </table:table-cell>
          <table:table-cell office:value-type="string" calcext:value-type="string">
            <text:p>R</text:p>
          </table:table-cell>
          <table:table-cell table:formula="of:=VLOOKUP([.I251];[$レアリティ番号.$A$1:$レアリティ番号.$B$4];2;0)" office:value-type="float" office:value="2" calcext:value-type="float">
            <text:p>2</text:p>
          </table:table-cell>
          <table:table-cell office:value-type="string" calcext:value-type="string">
            <text:p>イジン</text:p>
          </table:table-cell>
          <table:table-cell table:formula="of:=VLOOKUP([.K251];[$種類番号.$A$1:$種類番号.$B$4];2;0)" office:value-type="float" office:value="1" calcext:value-type="float">
            <text:p>1</text:p>
          </table:table-cell>
          <table:table-cell office:value-type="string" calcext:value-type="string">
            <text:p>青</text:p>
          </table:table-cell>
          <table:table-cell table:formula="of:=VLOOKUP([.M251];[$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徴募</text:p>
          </table:table-cell>
          <table:table-cell table:formula="of:=IFERROR(VLOOKUP([.$Q251];[$能力語番号.$A$1:$能力語番号.$B$10];2;0);0)" office:value-type="float" office:value="8" calcext:value-type="float">
            <text:p>8</text:p>
          </table:table-cell>
          <table:table-cell office:value-type="string" calcext:value-type="string">
            <text:p>思想</text:p>
          </table:table-cell>
          <table:table-cell table:formula="of:=IFERROR(VLOOKUP([.$S251];[$特性番号.$A$1:$特性番号.$B$8];2;0);0)" office:value-type="float" office:value="8" calcext:value-type="float">
            <text:p>8</text:p>
          </table:table-cell>
          <table:table-cell office:value-type="string" calcext:value-type="string">
            <text:p>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text:p>
          </table:table-cell>
          <table:table-cell table:style-name="ce8" table:formula="of:=NA()" office:value-type="string" office:string-value="" calcext:value-type="error">
            <text:p>#N/A</text:p>
          </table:table-cell>
          <table:table-cell table:formula="of:=IFERROR(VLOOKUP([.$V251];[$遺業能力番号.$A$1:$遺業能力番号.$B$9];2;0);0)" office:value-type="float" office:value="0" calcext:value-type="float">
            <text:p>0</text:p>
          </table:table-cell>
          <table:table-cell office:value-type="string" calcext:value-type="string">
            <text:p>https://one-draw.jp/ijinden/cardlist/003/card/03_022.png</text:p>
          </table:table-cell>
          <table:table-cell table:formula="of:=CONCATENATE([$JSON.$A$1];[.$C251];[$JSON.$B$1];[.$E251];[$JSON.$C$1];[.$F251];[$JSON.$D$1];IF(ISNA([.$S251]);&quot;null&quot;;&quot;&quot;&quot;&quot;&amp;[.$S251]&amp;&quot;&quot;&quot;&quot;);[$JSON.$E$1];[.$U251];[$JSON.$F$1];IF(ISNA([.$V251]);&quot;null&quot;;&quot;&quot;&quot;&quot;&amp;[.$V251]&amp;&quot;&quot;&quot;&quot;);[$JSON.$G$1];[.$X251];[$JSON.$H$1];[.$H251];[$JSON.$I$1];[.J251];[$JSON.$J$1];[.$L251];[$JSON.$K$1];[.$O251];[$JSON.$L$1];[.$N251];[$JSON.$M$1];[.$R251];[$JSON.$N$1];[.$T251];[$JSON.$O$1];[.$W251];[$JSON.$P$1];[.$A251];[$JSON.$Q$1];[.$B251];[$JSON.$R$1])" office:value-type="string" office:string-value="{&quot;id&quot;:&quot;3-22&quot;,&quot;name&quot;:&quot;高杉晋作&quot;,&quot;kana&quot;:&quot;たかすぎしんさく&quot;,&quot;traitText&quot;:&quot;思想&quot;,&quot;ruleText&quot;:&quot;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quot;,&quot;legacyText&quot;:null,&quot;imageUrl&quot;:&quot;https://one-draw.jp/ijinden/cardlist/003/card/03_022.png&quot;,&quot;expansion&quot;:35,&quot;rarity&quot;:2,&quot;type&quot;:1,&quot;level&quot;:2,&quot;color&quot;:2,&quot;term&quot;:8,&quot;trait&quot;:8,&quot;legacy&quot;:0,&quot;orderTable&quot;:250,&quot;orderDeck&quot;:40}," calcext:value-type="string">
            <text:p>{"id":"3-22","name":"高杉晋作","kana":"たかすぎしんさく","traitText":"思想","ruleText":"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legacyText":null,"imageUrl":"https://one-draw.jp/ijinden/cardlist/003/card/03_022.png","expansion":35,"rarity":2,"type":1,"level":2,"color":2,"term":8,"trait":8,"legacy":0,"orderTable":250,"orderDeck":40},</text:p>
          </table:table-cell>
          <table:table-cell table:number-columns-repeated="16347"/>
        </table:table-row>
        <table:table-row table:style-name="ro2">
          <table:table-cell office:value-type="float" office:value="251" calcext:value-type="float">
            <text:p>251</text:p>
          </table:table-cell>
          <table:table-cell office:value-type="float" office:value="121" calcext:value-type="float">
            <text:p>121</text:p>
          </table:table-cell>
          <table:table-cell office:value-type="string" calcext:value-type="string">
            <text:p>3-23</text:p>
          </table:table-cell>
          <table:table-cell office:value-type="float" office:value="23" calcext:value-type="float">
            <text:p>23</text:p>
          </table:table-cell>
          <table:table-cell office:value-type="string" calcext:value-type="string">
            <text:p>トマス・ニューコメン</text:p>
          </table:table-cell>
          <table:table-cell office:value-type="string" calcext:value-type="string">
            <text:p>とますにゅーこめん</text:p>
          </table:table-cell>
          <table:table-cell office:value-type="string" calcext:value-type="string">
            <text:p>第３弾ブースターパック</text:p>
          </table:table-cell>
          <table:table-cell table:formula="of:=VLOOKUP([.G252];[$収録番号.$A$1:$収録番号.$B$9];2;0)" office:value-type="float" office:value="35" calcext:value-type="float">
            <text:p>35</text:p>
          </table:table-cell>
          <table:table-cell office:value-type="string" calcext:value-type="string">
            <text:p>N</text:p>
          </table:table-cell>
          <table:table-cell table:formula="of:=VLOOKUP([.I252];[$レアリティ番号.$A$1:$レアリティ番号.$B$4];2;0)" office:value-type="float" office:value="1" calcext:value-type="float">
            <text:p>1</text:p>
          </table:table-cell>
          <table:table-cell office:value-type="string" calcext:value-type="string">
            <text:p>イジン</text:p>
          </table:table-cell>
          <table:table-cell table:formula="of:=VLOOKUP([.K252];[$種類番号.$A$1:$種類番号.$B$4];2;0)" office:value-type="float" office:value="1" calcext:value-type="float">
            <text:p>1</text:p>
          </table:table-cell>
          <table:table-cell office:value-type="string" calcext:value-type="string">
            <text:p>青</text:p>
          </table:table-cell>
          <table:table-cell table:formula="of:=VLOOKUP([.M252];[$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5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52];[$特性番号.$A$1:$特性番号.$B$8];2;0);0)" office:value-type="float" office:value="0" calcext:value-type="float">
            <text:p>0</text:p>
          </table:table-cell>
          <table:table-cell office:value-type="string" calcext:value-type="string">
            <text:p>これが戦場にいる間、自分の戦場の装備しているイジンは「破壊されたとき、自分の魔力ゾーンのマリョク1つを手札に戻して発動できる。これを破壊されていない状態にする」を得る。</text:p>
          </table:table-cell>
          <table:table-cell table:style-name="ce8" office:value-type="string" calcext:value-type="string">
            <text:p>1ドローする</text:p>
          </table:table-cell>
          <table:table-cell table:formula="of:=IFERROR(VLOOKUP([.$V252];[$遺業能力番号.$A$1:$遺業能力番号.$B$9];2;0);0)" office:value-type="float" office:value="4" calcext:value-type="float">
            <text:p>4</text:p>
          </table:table-cell>
          <table:table-cell office:value-type="string" calcext:value-type="string">
            <text:p>https://one-draw.jp/ijinden/cardlist/003/card/03_023.png</text:p>
          </table:table-cell>
          <table:table-cell table:formula="of:=CONCATENATE([$JSON.$A$1];[.$C252];[$JSON.$B$1];[.$E252];[$JSON.$C$1];[.$F252];[$JSON.$D$1];IF(ISNA([.$S252]);&quot;null&quot;;&quot;&quot;&quot;&quot;&amp;[.$S252]&amp;&quot;&quot;&quot;&quot;);[$JSON.$E$1];[.$U252];[$JSON.$F$1];IF(ISNA([.$V252]);&quot;null&quot;;&quot;&quot;&quot;&quot;&amp;[.$V252]&amp;&quot;&quot;&quot;&quot;);[$JSON.$G$1];[.$X252];[$JSON.$H$1];[.$H252];[$JSON.$I$1];[.J252];[$JSON.$J$1];[.$L252];[$JSON.$K$1];[.$O252];[$JSON.$L$1];[.$N252];[$JSON.$M$1];[.$R252];[$JSON.$N$1];[.$T252];[$JSON.$O$1];[.$W252];[$JSON.$P$1];[.$A252];[$JSON.$Q$1];[.$B252];[$JSON.$R$1])" office:value-type="string" office:string-value="{&quot;id&quot;:&quot;3-23&quot;,&quot;name&quot;:&quot;トマス・ニューコメン&quot;,&quot;kana&quot;:&quot;とますにゅーこめん&quot;,&quot;traitText&quot;:null,&quot;ruleText&quot;:&quot;これが戦場にいる間、自分の戦場の装備しているイジンは「破壊されたとき、自分の魔力ゾーンのマリョク1つを手札に戻して発動できる。これを破壊されていない状態にする」を得る。&quot;,&quot;legacyText&quot;:&quot;1ドローする&quot;,&quot;imageUrl&quot;:&quot;https://one-draw.jp/ijinden/cardlist/003/card/03_023.png&quot;,&quot;expansion&quot;:35,&quot;rarity&quot;:1,&quot;type&quot;:1,&quot;level&quot;:4,&quot;color&quot;:2,&quot;term&quot;:0,&quot;trait&quot;:0,&quot;legacy&quot;:4,&quot;orderTable&quot;:251,&quot;orderDeck&quot;:121}," calcext:value-type="string">
            <text:p>{"id":"3-23","name":"トマス・ニューコメン","kana":"とますにゅーこめん","traitText":null,"ruleText":"これが戦場にいる間、自分の戦場の装備しているイジンは「破壊されたとき、自分の魔力ゾーンのマリョク1つを手札に戻して発動できる。これを破壊されていない状態にする」を得る。","legacyText":"1ドローする","imageUrl":"https://one-draw.jp/ijinden/cardlist/003/card/03_023.png","expansion":35,"rarity":1,"type":1,"level":4,"color":2,"term":0,"trait":0,"legacy":4,"orderTable":251,"orderDeck":121},</text:p>
          </table:table-cell>
          <table:table-cell table:number-columns-repeated="16347"/>
        </table:table-row>
        <table:table-row table:style-name="ro2">
          <table:table-cell office:value-type="float" office:value="252" calcext:value-type="float">
            <text:p>252</text:p>
          </table:table-cell>
          <table:table-cell office:value-type="float" office:value="161" calcext:value-type="float">
            <text:p>161</text:p>
          </table:table-cell>
          <table:table-cell office:value-type="string" calcext:value-type="string">
            <text:p>3-24</text:p>
          </table:table-cell>
          <table:table-cell office:value-type="float" office:value="24" calcext:value-type="float">
            <text:p>24</text:p>
          </table:table-cell>
          <table:table-cell office:value-type="string" calcext:value-type="string">
            <text:p>アダム・ラクスマン</text:p>
          </table:table-cell>
          <table:table-cell office:value-type="string" calcext:value-type="string">
            <text:p>あだむらくすまん</text:p>
          </table:table-cell>
          <table:table-cell office:value-type="string" calcext:value-type="string">
            <text:p>第３弾ブースターパック</text:p>
          </table:table-cell>
          <table:table-cell table:formula="of:=VLOOKUP([.G253];[$収録番号.$A$1:$収録番号.$B$9];2;0)" office:value-type="float" office:value="35" calcext:value-type="float">
            <text:p>35</text:p>
          </table:table-cell>
          <table:table-cell office:value-type="string" calcext:value-type="string">
            <text:p>N</text:p>
          </table:table-cell>
          <table:table-cell table:formula="of:=VLOOKUP([.I253];[$レアリティ番号.$A$1:$レアリティ番号.$B$4];2;0)" office:value-type="float" office:value="1" calcext:value-type="float">
            <text:p>1</text:p>
          </table:table-cell>
          <table:table-cell office:value-type="string" calcext:value-type="string">
            <text:p>イジン</text:p>
          </table:table-cell>
          <table:table-cell table:formula="of:=VLOOKUP([.K253];[$種類番号.$A$1:$種類番号.$B$4];2;0)" office:value-type="float" office:value="1" calcext:value-type="float">
            <text:p>1</text:p>
          </table:table-cell>
          <table:table-cell office:value-type="string" calcext:value-type="string">
            <text:p>青</text:p>
          </table:table-cell>
          <table:table-cell table:formula="of:=VLOOKUP([.M253];[$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5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53];[$特性番号.$A$1:$特性番号.$B$8];2;0);0)" office:value-type="float" office:value="0" calcext:value-type="float">
            <text:p>0</text:p>
          </table:table-cell>
          <table:table-cell office:value-type="string" calcext:value-type="string">
            <text:p>この能力はターンに1回しか発動しない。能力によって「航海」を持つイジンが自分の戦場を離れたとき、自分の手札のレベル3以下の青のイジン1体を指定して発動できる。そのイジンを戦場に置く。¶ブロック+2000</text:p>
          </table:table-cell>
          <table:table-cell table:style-name="ce8" table:formula="of:=NA()" office:value-type="string" office:string-value="" calcext:value-type="error">
            <text:p>#N/A</text:p>
          </table:table-cell>
          <table:table-cell table:formula="of:=IFERROR(VLOOKUP([.$V253];[$遺業能力番号.$A$1:$遺業能力番号.$B$9];2;0);0)" office:value-type="float" office:value="0" calcext:value-type="float">
            <text:p>0</text:p>
          </table:table-cell>
          <table:table-cell office:value-type="string" calcext:value-type="string">
            <text:p>https://one-draw.jp/ijinden/cardlist/003/card/03_024.png</text:p>
          </table:table-cell>
          <table:table-cell table:formula="of:=CONCATENATE([$JSON.$A$1];[.$C253];[$JSON.$B$1];[.$E253];[$JSON.$C$1];[.$F253];[$JSON.$D$1];IF(ISNA([.$S253]);&quot;null&quot;;&quot;&quot;&quot;&quot;&amp;[.$S253]&amp;&quot;&quot;&quot;&quot;);[$JSON.$E$1];[.$U253];[$JSON.$F$1];IF(ISNA([.$V253]);&quot;null&quot;;&quot;&quot;&quot;&quot;&amp;[.$V253]&amp;&quot;&quot;&quot;&quot;);[$JSON.$G$1];[.$X253];[$JSON.$H$1];[.$H253];[$JSON.$I$1];[.J253];[$JSON.$J$1];[.$L253];[$JSON.$K$1];[.$O253];[$JSON.$L$1];[.$N253];[$JSON.$M$1];[.$R253];[$JSON.$N$1];[.$T253];[$JSON.$O$1];[.$W253];[$JSON.$P$1];[.$A253];[$JSON.$Q$1];[.$B253];[$JSON.$R$1])" office:value-type="string" office:string-value="{&quot;id&quot;:&quot;3-24&quot;,&quot;name&quot;:&quot;アダム・ラクスマン&quot;,&quot;kana&quot;:&quot;あだむらくすまん&quot;,&quot;traitText&quot;:null,&quot;ruleText&quot;:&quot;この能力はターンに1回しか発動しない。能力によって「航海」を持つイジンが自分の戦場を離れたとき、自分の手札のレベル3以下の青のイジン1体を指定して発動できる。そのイジンを戦場に置く。¶ブロック+2000&quot;,&quot;legacyText&quot;:null,&quot;imageUrl&quot;:&quot;https://one-draw.jp/ijinden/cardlist/003/card/03_024.png&quot;,&quot;expansion&quot;:35,&quot;rarity&quot;:1,&quot;type&quot;:1,&quot;level&quot;:5,&quot;color&quot;:2,&quot;term&quot;:0,&quot;trait&quot;:0,&quot;legacy&quot;:0,&quot;orderTable&quot;:252,&quot;orderDeck&quot;:161}," calcext:value-type="string">
            <text:p>{"id":"3-24","name":"アダム・ラクスマン","kana":"あだむらくすまん","traitText":null,"ruleText":"この能力はターンに1回しか発動しない。能力によって「航海」を持つイジンが自分の戦場を離れたとき、自分の手札のレベル3以下の青のイジン1体を指定して発動できる。そのイジンを戦場に置く。¶ブロック+2000","legacyText":null,"imageUrl":"https://one-draw.jp/ijinden/cardlist/003/card/03_024.png","expansion":35,"rarity":1,"type":1,"level":5,"color":2,"term":0,"trait":0,"legacy":0,"orderTable":252,"orderDeck":161},</text:p>
          </table:table-cell>
          <table:table-cell table:number-columns-repeated="16347"/>
        </table:table-row>
        <table:table-row table:style-name="ro2">
          <table:table-cell office:value-type="float" office:value="253" calcext:value-type="float">
            <text:p>253</text:p>
          </table:table-cell>
          <table:table-cell office:value-type="float" office:value="41" calcext:value-type="float">
            <text:p>41</text:p>
          </table:table-cell>
          <table:table-cell office:value-type="string" calcext:value-type="string">
            <text:p>3-25</text:p>
          </table:table-cell>
          <table:table-cell office:value-type="float" office:value="25" calcext:value-type="float">
            <text:p>25</text:p>
          </table:table-cell>
          <table:table-cell office:value-type="string" calcext:value-type="string">
            <text:p>大黒屋光太夫</text:p>
          </table:table-cell>
          <table:table-cell office:value-type="string" calcext:value-type="string">
            <text:p>だいこくやこうだゆう</text:p>
          </table:table-cell>
          <table:table-cell office:value-type="string" calcext:value-type="string">
            <text:p>第３弾ブースターパック</text:p>
          </table:table-cell>
          <table:table-cell table:formula="of:=VLOOKUP([.G254];[$収録番号.$A$1:$収録番号.$B$9];2;0)" office:value-type="float" office:value="35" calcext:value-type="float">
            <text:p>35</text:p>
          </table:table-cell>
          <table:table-cell office:value-type="string" calcext:value-type="string">
            <text:p>N</text:p>
          </table:table-cell>
          <table:table-cell table:formula="of:=VLOOKUP([.I254];[$レアリティ番号.$A$1:$レアリティ番号.$B$4];2;0)" office:value-type="float" office:value="1" calcext:value-type="float">
            <text:p>1</text:p>
          </table:table-cell>
          <table:table-cell office:value-type="string" calcext:value-type="string">
            <text:p>イジン</text:p>
          </table:table-cell>
          <table:table-cell table:formula="of:=VLOOKUP([.K254];[$種類番号.$A$1:$種類番号.$B$4];2;0)" office:value-type="float" office:value="1" calcext:value-type="float">
            <text:p>1</text:p>
          </table:table-cell>
          <table:table-cell office:value-type="string" calcext:value-type="string">
            <text:p>青</text:p>
          </table:table-cell>
          <table:table-cell table:formula="of:=VLOOKUP([.M254];[$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航海</text:p>
          </table:table-cell>
          <table:table-cell table:formula="of:=IFERROR(VLOOKUP([.$Q254];[$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254];[$特性番号.$A$1:$特性番号.$B$8];2;0);0)" office:value-type="float" office:value="0" calcext:value-type="float">
            <text:p>0</text:p>
          </table:table-cell>
          <table:table-cell office:value-type="string" calcext:value-type="string">
            <text:p>航海 - アタッカーになったとき、相手の魔力ゾーンの裏のカード1つを指定して発動できる。そのカードと、これを手札に戻す。</text:p>
          </table:table-cell>
          <table:table-cell table:style-name="ce8" office:value-type="string" calcext:value-type="string">
            <text:p>1ドローする</text:p>
          </table:table-cell>
          <table:table-cell table:formula="of:=IFERROR(VLOOKUP([.$V254];[$遺業能力番号.$A$1:$遺業能力番号.$B$9];2;0);0)" office:value-type="float" office:value="4" calcext:value-type="float">
            <text:p>4</text:p>
          </table:table-cell>
          <table:table-cell office:value-type="string" calcext:value-type="string">
            <text:p>https://one-draw.jp/ijinden/cardlist/003/card/03_025.png</text:p>
          </table:table-cell>
          <table:table-cell table:formula="of:=CONCATENATE([$JSON.$A$1];[.$C254];[$JSON.$B$1];[.$E254];[$JSON.$C$1];[.$F254];[$JSON.$D$1];IF(ISNA([.$S254]);&quot;null&quot;;&quot;&quot;&quot;&quot;&amp;[.$S254]&amp;&quot;&quot;&quot;&quot;);[$JSON.$E$1];[.$U254];[$JSON.$F$1];IF(ISNA([.$V254]);&quot;null&quot;;&quot;&quot;&quot;&quot;&amp;[.$V254]&amp;&quot;&quot;&quot;&quot;);[$JSON.$G$1];[.$X254];[$JSON.$H$1];[.$H254];[$JSON.$I$1];[.J254];[$JSON.$J$1];[.$L254];[$JSON.$K$1];[.$O254];[$JSON.$L$1];[.$N254];[$JSON.$M$1];[.$R254];[$JSON.$N$1];[.$T254];[$JSON.$O$1];[.$W254];[$JSON.$P$1];[.$A254];[$JSON.$Q$1];[.$B254];[$JSON.$R$1])" office:value-type="string" office:string-value="{&quot;id&quot;:&quot;3-25&quot;,&quot;name&quot;:&quot;大黒屋光太夫&quot;,&quot;kana&quot;:&quot;だいこくやこうだゆう&quot;,&quot;traitText&quot;:null,&quot;ruleText&quot;:&quot;航海 - アタッカーになったとき、相手の魔力ゾーンの裏のカード1つを指定して発動できる。そのカードと、これを手札に戻す。&quot;,&quot;legacyText&quot;:&quot;1ドローする&quot;,&quot;imageUrl&quot;:&quot;https://one-draw.jp/ijinden/cardlist/003/card/03_025.png&quot;,&quot;expansion&quot;:35,&quot;rarity&quot;:1,&quot;type&quot;:1,&quot;level&quot;:2,&quot;color&quot;:2,&quot;term&quot;:1,&quot;trait&quot;:0,&quot;legacy&quot;:4,&quot;orderTable&quot;:253,&quot;orderDeck&quot;:41}," calcext:value-type="string">
            <text:p>{"id":"3-25","name":"大黒屋光太夫","kana":"だいこくやこうだゆう","traitText":null,"ruleText":"航海 - アタッカーになったとき、相手の魔力ゾーンの裏のカード1つを指定して発動できる。そのカードと、これを手札に戻す。","legacyText":"1ドローする","imageUrl":"https://one-draw.jp/ijinden/cardlist/003/card/03_025.png","expansion":35,"rarity":1,"type":1,"level":2,"color":2,"term":1,"trait":0,"legacy":4,"orderTable":253,"orderDeck":41},</text:p>
          </table:table-cell>
          <table:table-cell table:number-columns-repeated="16347"/>
        </table:table-row>
        <table:table-row table:style-name="ro2">
          <table:table-cell office:value-type="float" office:value="254" calcext:value-type="float">
            <text:p>254</text:p>
          </table:table-cell>
          <table:table-cell office:value-type="float" office:value="10" calcext:value-type="float">
            <text:p>10</text:p>
          </table:table-cell>
          <table:table-cell office:value-type="string" calcext:value-type="string">
            <text:p>3-26</text:p>
          </table:table-cell>
          <table:table-cell office:value-type="float" office:value="26" calcext:value-type="float">
            <text:p>26</text:p>
          </table:table-cell>
          <table:table-cell office:value-type="string" calcext:value-type="string">
            <text:p>ニコライ・レザノフ</text:p>
          </table:table-cell>
          <table:table-cell office:value-type="string" calcext:value-type="string">
            <text:p>にこらいれざのふ</text:p>
          </table:table-cell>
          <table:table-cell office:value-type="string" calcext:value-type="string">
            <text:p>第３弾ブースターパック</text:p>
          </table:table-cell>
          <table:table-cell table:formula="of:=VLOOKUP([.G255];[$収録番号.$A$1:$収録番号.$B$9];2;0)" office:value-type="float" office:value="35" calcext:value-type="float">
            <text:p>35</text:p>
          </table:table-cell>
          <table:table-cell office:value-type="string" calcext:value-type="string">
            <text:p>N</text:p>
          </table:table-cell>
          <table:table-cell table:formula="of:=VLOOKUP([.I255];[$レアリティ番号.$A$1:$レアリティ番号.$B$4];2;0)" office:value-type="float" office:value="1" calcext:value-type="float">
            <text:p>1</text:p>
          </table:table-cell>
          <table:table-cell office:value-type="string" calcext:value-type="string">
            <text:p>イジン</text:p>
          </table:table-cell>
          <table:table-cell table:formula="of:=VLOOKUP([.K255];[$種類番号.$A$1:$種類番号.$B$4];2;0)" office:value-type="float" office:value="1" calcext:value-type="float">
            <text:p>1</text:p>
          </table:table-cell>
          <table:table-cell office:value-type="string" calcext:value-type="string">
            <text:p>青</text:p>
          </table:table-cell>
          <table:table-cell table:formula="of:=VLOOKUP([.M255];[$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office:value-type="string" calcext:value-type="string">
            <text:p>航海</text:p>
          </table:table-cell>
          <table:table-cell table:formula="of:=IFERROR(VLOOKUP([.$Q255];[$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255];[$特性番号.$A$1:$特性番号.$B$8];2;0);0)" office:value-type="float" office:value="0" calcext:value-type="float">
            <text:p>0</text:p>
          </table:table-cell>
          <table:table-cell office:value-type="string" calcext:value-type="string">
            <text:p>航海 - アタッカーになったときに発動する。『ブロック+』能力を持つアタッカーすべては、このターンに限り「ガーディアンにブロックされたとき、これを起こす」を得る。</text:p>
          </table:table-cell>
          <table:table-cell table:style-name="ce8" table:formula="of:=NA()" office:value-type="string" office:string-value="" calcext:value-type="error">
            <text:p>#N/A</text:p>
          </table:table-cell>
          <table:table-cell table:formula="of:=IFERROR(VLOOKUP([.$V255];[$遺業能力番号.$A$1:$遺業能力番号.$B$9];2;0);0)" office:value-type="float" office:value="0" calcext:value-type="float">
            <text:p>0</text:p>
          </table:table-cell>
          <table:table-cell office:value-type="string" calcext:value-type="string">
            <text:p>https://one-draw.jp/ijinden/cardlist/003/card/03_026.png</text:p>
          </table:table-cell>
          <table:table-cell table:formula="of:=CONCATENATE([$JSON.$A$1];[.$C255];[$JSON.$B$1];[.$E255];[$JSON.$C$1];[.$F255];[$JSON.$D$1];IF(ISNA([.$S255]);&quot;null&quot;;&quot;&quot;&quot;&quot;&amp;[.$S255]&amp;&quot;&quot;&quot;&quot;);[$JSON.$E$1];[.$U255];[$JSON.$F$1];IF(ISNA([.$V255]);&quot;null&quot;;&quot;&quot;&quot;&quot;&amp;[.$V255]&amp;&quot;&quot;&quot;&quot;);[$JSON.$G$1];[.$X255];[$JSON.$H$1];[.$H255];[$JSON.$I$1];[.J255];[$JSON.$J$1];[.$L255];[$JSON.$K$1];[.$O255];[$JSON.$L$1];[.$N255];[$JSON.$M$1];[.$R255];[$JSON.$N$1];[.$T255];[$JSON.$O$1];[.$W255];[$JSON.$P$1];[.$A255];[$JSON.$Q$1];[.$B255];[$JSON.$R$1])" office:value-type="string" office:string-value="{&quot;id&quot;:&quot;3-26&quot;,&quot;name&quot;:&quot;ニコライ・レザノフ&quot;,&quot;kana&quot;:&quot;にこらいれざのふ&quot;,&quot;traitText&quot;:null,&quot;ruleText&quot;:&quot;航海 - アタッカーになったときに発動する。『ブロック+』能力を持つアタッカーすべては、このターンに限り「ガーディアンにブロックされたとき、これを起こす」を得る。&quot;,&quot;legacyText&quot;:null,&quot;imageUrl&quot;:&quot;https://one-draw.jp/ijinden/cardlist/003/card/03_026.png&quot;,&quot;expansion&quot;:35,&quot;rarity&quot;:1,&quot;type&quot;:1,&quot;level&quot;:1,&quot;color&quot;:2,&quot;term&quot;:1,&quot;trait&quot;:0,&quot;legacy&quot;:0,&quot;orderTable&quot;:254,&quot;orderDeck&quot;:10}," calcext:value-type="string">
            <text:p>{"id":"3-26","name":"ニコライ・レザノフ","kana":"にこらいれざのふ","traitText":null,"ruleText":"航海 - アタッカーになったときに発動する。『ブロック+』能力を持つアタッカーすべては、このターンに限り「ガーディアンにブロックされたとき、これを起こす」を得る。","legacyText":null,"imageUrl":"https://one-draw.jp/ijinden/cardlist/003/card/03_026.png","expansion":35,"rarity":1,"type":1,"level":1,"color":2,"term":1,"trait":0,"legacy":0,"orderTable":254,"orderDeck":10},</text:p>
          </table:table-cell>
          <table:table-cell table:number-columns-repeated="16347"/>
        </table:table-row>
        <table:table-row table:style-name="ro2">
          <table:table-cell office:value-type="float" office:value="255" calcext:value-type="float">
            <text:p>255</text:p>
          </table:table-cell>
          <table:table-cell office:value-type="float" office:value="90" calcext:value-type="float">
            <text:p>90</text:p>
          </table:table-cell>
          <table:table-cell office:value-type="string" calcext:value-type="string">
            <text:p>3-27</text:p>
          </table:table-cell>
          <table:table-cell office:value-type="float" office:value="27" calcext:value-type="float">
            <text:p>27</text:p>
          </table:table-cell>
          <table:table-cell office:value-type="string" calcext:value-type="string">
            <text:p>小野小町</text:p>
          </table:table-cell>
          <table:table-cell office:value-type="string" calcext:value-type="string">
            <text:p>おののこまち</text:p>
          </table:table-cell>
          <table:table-cell office:value-type="string" calcext:value-type="string">
            <text:p>第３弾ブースターパック</text:p>
          </table:table-cell>
          <table:table-cell table:formula="of:=VLOOKUP([.G256];[$収録番号.$A$1:$収録番号.$B$9];2;0)" office:value-type="float" office:value="35" calcext:value-type="float">
            <text:p>35</text:p>
          </table:table-cell>
          <table:table-cell office:value-type="string" calcext:value-type="string">
            <text:p>R</text:p>
          </table:table-cell>
          <table:table-cell table:formula="of:=VLOOKUP([.I256];[$レアリティ番号.$A$1:$レアリティ番号.$B$4];2;0)" office:value-type="float" office:value="2" calcext:value-type="float">
            <text:p>2</text:p>
          </table:table-cell>
          <table:table-cell office:value-type="string" calcext:value-type="string">
            <text:p>イジン</text:p>
          </table:table-cell>
          <table:table-cell table:formula="of:=VLOOKUP([.K256];[$種類番号.$A$1:$種類番号.$B$4];2;0)" office:value-type="float" office:value="1" calcext:value-type="float">
            <text:p>1</text:p>
          </table:table-cell>
          <table:table-cell office:value-type="string" calcext:value-type="string">
            <text:p>緑</text:p>
          </table:table-cell>
          <table:table-cell table:formula="of:=VLOOKUP([.M256];[$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5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56];[$特性番号.$A$1:$特性番号.$B$8];2;0);0)" office:value-type="float" office:value="0" calcext:value-type="float">
            <text:p>0</text:p>
          </table:table-cell>
          <table:table-cell office:value-type="string" calcext:value-type="string">
            <text:p>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text:p>
          </table:table-cell>
          <table:table-cell table:style-name="ce8" office:value-type="string" calcext:value-type="string">
            <text:p>木霊</text:p>
          </table:table-cell>
          <table:table-cell table:formula="of:=IFERROR(VLOOKUP([.$V256];[$遺業能力番号.$A$1:$遺業能力番号.$B$9];2;0);0)" office:value-type="float" office:value="8" calcext:value-type="float">
            <text:p>8</text:p>
          </table:table-cell>
          <table:table-cell office:value-type="string" calcext:value-type="string">
            <text:p>https://one-draw.jp/ijinden/cardlist/003/card/03_027.png</text:p>
          </table:table-cell>
          <table:table-cell table:formula="of:=CONCATENATE([$JSON.$A$1];[.$C256];[$JSON.$B$1];[.$E256];[$JSON.$C$1];[.$F256];[$JSON.$D$1];IF(ISNA([.$S256]);&quot;null&quot;;&quot;&quot;&quot;&quot;&amp;[.$S256]&amp;&quot;&quot;&quot;&quot;);[$JSON.$E$1];[.$U256];[$JSON.$F$1];IF(ISNA([.$V256]);&quot;null&quot;;&quot;&quot;&quot;&quot;&amp;[.$V256]&amp;&quot;&quot;&quot;&quot;);[$JSON.$G$1];[.$X256];[$JSON.$H$1];[.$H256];[$JSON.$I$1];[.J256];[$JSON.$J$1];[.$L256];[$JSON.$K$1];[.$O256];[$JSON.$L$1];[.$N256];[$JSON.$M$1];[.$R256];[$JSON.$N$1];[.$T256];[$JSON.$O$1];[.$W256];[$JSON.$P$1];[.$A256];[$JSON.$Q$1];[.$B256];[$JSON.$R$1])" office:value-type="string" office:string-value="{&quot;id&quot;:&quot;3-27&quot;,&quot;name&quot;:&quot;小野小町&quot;,&quot;kana&quot;:&quot;おののこまち&quot;,&quot;traitText&quot;:null,&quot;ruleText&quot;:&quot;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quot;,&quot;legacyText&quot;:&quot;木霊&quot;,&quot;imageUrl&quot;:&quot;https://one-draw.jp/ijinden/cardlist/003/card/03_027.png&quot;,&quot;expansion&quot;:35,&quot;rarity&quot;:2,&quot;type&quot;:1,&quot;level&quot;:3,&quot;color&quot;:4,&quot;term&quot;:2,&quot;trait&quot;:0,&quot;legacy&quot;:8,&quot;orderTable&quot;:255,&quot;orderDeck&quot;:90}," calcext:value-type="string">
            <text:p>{"id":"3-27","name":"小野小町","kana":"おののこまち","traitText":null,"ruleText":"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legacyText":"木霊","imageUrl":"https://one-draw.jp/ijinden/cardlist/003/card/03_027.png","expansion":35,"rarity":2,"type":1,"level":3,"color":4,"term":2,"trait":0,"legacy":8,"orderTable":255,"orderDeck":90},</text:p>
          </table:table-cell>
          <table:table-cell table:number-columns-repeated="16347"/>
        </table:table-row>
        <table:table-row table:style-name="ro2">
          <table:table-cell office:value-type="float" office:value="256" calcext:value-type="float">
            <text:p>256</text:p>
          </table:table-cell>
          <table:table-cell office:value-type="float" office:value="91" calcext:value-type="float">
            <text:p>91</text:p>
          </table:table-cell>
          <table:table-cell office:value-type="string" calcext:value-type="string">
            <text:p>3-28</text:p>
          </table:table-cell>
          <table:table-cell office:value-type="float" office:value="28" calcext:value-type="float">
            <text:p>28</text:p>
          </table:table-cell>
          <table:table-cell office:value-type="string" calcext:value-type="string">
            <text:p>松尾芭蕉</text:p>
          </table:table-cell>
          <table:table-cell office:value-type="string" calcext:value-type="string">
            <text:p>まつおばしょう</text:p>
          </table:table-cell>
          <table:table-cell office:value-type="string" calcext:value-type="string">
            <text:p>第３弾ブースターパック</text:p>
          </table:table-cell>
          <table:table-cell table:formula="of:=VLOOKUP([.G257];[$収録番号.$A$1:$収録番号.$B$9];2;0)" office:value-type="float" office:value="35" calcext:value-type="float">
            <text:p>35</text:p>
          </table:table-cell>
          <table:table-cell office:value-type="string" calcext:value-type="string">
            <text:p>N</text:p>
          </table:table-cell>
          <table:table-cell table:formula="of:=VLOOKUP([.I257];[$レアリティ番号.$A$1:$レアリティ番号.$B$4];2;0)" office:value-type="float" office:value="1" calcext:value-type="float">
            <text:p>1</text:p>
          </table:table-cell>
          <table:table-cell office:value-type="string" calcext:value-type="string">
            <text:p>イジン</text:p>
          </table:table-cell>
          <table:table-cell table:formula="of:=VLOOKUP([.K257];[$種類番号.$A$1:$種類番号.$B$4];2;0)" office:value-type="float" office:value="1" calcext:value-type="float">
            <text:p>1</text:p>
          </table:table-cell>
          <table:table-cell office:value-type="string" calcext:value-type="string">
            <text:p>緑</text:p>
          </table:table-cell>
          <table:table-cell table:formula="of:=VLOOKUP([.M257];[$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57];[$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57];[$特性番号.$A$1:$特性番号.$B$8];2;0);0)" office:value-type="float" office:value="0" calcext:value-type="float">
            <text:p>0</text:p>
          </table:table-cell>
          <table:table-cell office:value-type="string" calcext:value-type="string">
            <text:p>スタンド¶執筆 - 緑のハイケイが戦場に置かれたとき、1ドローして、これを裏向きで魔力ゾーンに置く。</text:p>
          </table:table-cell>
          <table:table-cell table:style-name="ce8" office:value-type="string" calcext:value-type="string">
            <text:p>1ドローする</text:p>
          </table:table-cell>
          <table:table-cell table:formula="of:=IFERROR(VLOOKUP([.$V257];[$遺業能力番号.$A$1:$遺業能力番号.$B$9];2;0);0)" office:value-type="float" office:value="4" calcext:value-type="float">
            <text:p>4</text:p>
          </table:table-cell>
          <table:table-cell office:value-type="string" calcext:value-type="string">
            <text:p>https://one-draw.jp/ijinden/cardlist/003/card/03_028.png</text:p>
          </table:table-cell>
          <table:table-cell table:formula="of:=CONCATENATE([$JSON.$A$1];[.$C257];[$JSON.$B$1];[.$E257];[$JSON.$C$1];[.$F257];[$JSON.$D$1];IF(ISNA([.$S257]);&quot;null&quot;;&quot;&quot;&quot;&quot;&amp;[.$S257]&amp;&quot;&quot;&quot;&quot;);[$JSON.$E$1];[.$U257];[$JSON.$F$1];IF(ISNA([.$V257]);&quot;null&quot;;&quot;&quot;&quot;&quot;&amp;[.$V257]&amp;&quot;&quot;&quot;&quot;);[$JSON.$G$1];[.$X257];[$JSON.$H$1];[.$H257];[$JSON.$I$1];[.J257];[$JSON.$J$1];[.$L257];[$JSON.$K$1];[.$O257];[$JSON.$L$1];[.$N257];[$JSON.$M$1];[.$R257];[$JSON.$N$1];[.$T257];[$JSON.$O$1];[.$W257];[$JSON.$P$1];[.$A257];[$JSON.$Q$1];[.$B257];[$JSON.$R$1])" office:value-type="string" office:string-value="{&quot;id&quot;:&quot;3-28&quot;,&quot;name&quot;:&quot;松尾芭蕉&quot;,&quot;kana&quot;:&quot;まつおばしょう&quot;,&quot;traitText&quot;:null,&quot;ruleText&quot;:&quot;スタンド¶執筆 - 緑のハイケイが戦場に置かれたとき、1ドローして、これを裏向きで魔力ゾーンに置く。&quot;,&quot;legacyText&quot;:&quot;1ドローする&quot;,&quot;imageUrl&quot;:&quot;https://one-draw.jp/ijinden/cardlist/003/card/03_028.png&quot;,&quot;expansion&quot;:35,&quot;rarity&quot;:1,&quot;type&quot;:1,&quot;level&quot;:3,&quot;color&quot;:4,&quot;term&quot;:2,&quot;trait&quot;:0,&quot;legacy&quot;:4,&quot;orderTable&quot;:256,&quot;orderDeck&quot;:91}," calcext:value-type="string">
            <text:p>{"id":"3-28","name":"松尾芭蕉","kana":"まつおばしょう","traitText":null,"ruleText":"スタンド¶執筆 - 緑のハイケイが戦場に置かれたとき、1ドローして、これを裏向きで魔力ゾーンに置く。","legacyText":"1ドローする","imageUrl":"https://one-draw.jp/ijinden/cardlist/003/card/03_028.png","expansion":35,"rarity":1,"type":1,"level":3,"color":4,"term":2,"trait":0,"legacy":4,"orderTable":256,"orderDeck":91},</text:p>
          </table:table-cell>
          <table:table-cell table:number-columns-repeated="16347"/>
        </table:table-row>
        <table:table-row table:style-name="ro2">
          <table:table-cell office:value-type="float" office:value="257" calcext:value-type="float">
            <text:p>257</text:p>
          </table:table-cell>
          <table:table-cell office:value-type="float" office:value="129" calcext:value-type="float">
            <text:p>129</text:p>
          </table:table-cell>
          <table:table-cell office:value-type="string" calcext:value-type="string">
            <text:p>3-29</text:p>
          </table:table-cell>
          <table:table-cell office:value-type="float" office:value="29" calcext:value-type="float">
            <text:p>29</text:p>
          </table:table-cell>
          <table:table-cell office:value-type="string" calcext:value-type="string">
            <text:p>朱舜水</text:p>
          </table:table-cell>
          <table:table-cell office:value-type="string" calcext:value-type="string">
            <text:p>しゅしゅんすい</text:p>
          </table:table-cell>
          <table:table-cell office:value-type="string" calcext:value-type="string">
            <text:p>第３弾ブースターパック</text:p>
          </table:table-cell>
          <table:table-cell table:formula="of:=VLOOKUP([.G258];[$収録番号.$A$1:$収録番号.$B$9];2;0)" office:value-type="float" office:value="35" calcext:value-type="float">
            <text:p>35</text:p>
          </table:table-cell>
          <table:table-cell office:value-type="string" calcext:value-type="string">
            <text:p>N</text:p>
          </table:table-cell>
          <table:table-cell table:formula="of:=VLOOKUP([.I258];[$レアリティ番号.$A$1:$レアリティ番号.$B$4];2;0)" office:value-type="float" office:value="1" calcext:value-type="float">
            <text:p>1</text:p>
          </table:table-cell>
          <table:table-cell office:value-type="string" calcext:value-type="string">
            <text:p>イジン</text:p>
          </table:table-cell>
          <table:table-cell table:formula="of:=VLOOKUP([.K258];[$種類番号.$A$1:$種類番号.$B$4];2;0)" office:value-type="float" office:value="1" calcext:value-type="float">
            <text:p>1</text:p>
          </table:table-cell>
          <table:table-cell office:value-type="string" calcext:value-type="string">
            <text:p>緑</text:p>
          </table:table-cell>
          <table:table-cell table:formula="of:=VLOOKUP([.M258];[$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58];[$特性番号.$A$1:$特性番号.$B$8];2;0);0)" office:value-type="float" office:value="0" calcext:value-type="float">
            <text:p>0</text:p>
          </table:table-cell>
          <table:table-cell office:value-type="string" calcext:value-type="string">
            <text:p>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text:p>
          </table:table-cell>
          <table:table-cell table:style-name="ce8" office:value-type="string" calcext:value-type="string">
            <text:p>木霊</text:p>
          </table:table-cell>
          <table:table-cell table:formula="of:=IFERROR(VLOOKUP([.$V258];[$遺業能力番号.$A$1:$遺業能力番号.$B$9];2;0);0)" office:value-type="float" office:value="8" calcext:value-type="float">
            <text:p>8</text:p>
          </table:table-cell>
          <table:table-cell office:value-type="string" calcext:value-type="string">
            <text:p>https://one-draw.jp/ijinden/cardlist/003/card/03_029.png</text:p>
          </table:table-cell>
          <table:table-cell table:formula="of:=CONCATENATE([$JSON.$A$1];[.$C258];[$JSON.$B$1];[.$E258];[$JSON.$C$1];[.$F258];[$JSON.$D$1];IF(ISNA([.$S258]);&quot;null&quot;;&quot;&quot;&quot;&quot;&amp;[.$S258]&amp;&quot;&quot;&quot;&quot;);[$JSON.$E$1];[.$U258];[$JSON.$F$1];IF(ISNA([.$V258]);&quot;null&quot;;&quot;&quot;&quot;&quot;&amp;[.$V258]&amp;&quot;&quot;&quot;&quot;);[$JSON.$G$1];[.$X258];[$JSON.$H$1];[.$H258];[$JSON.$I$1];[.J258];[$JSON.$J$1];[.$L258];[$JSON.$K$1];[.$O258];[$JSON.$L$1];[.$N258];[$JSON.$M$1];[.$R258];[$JSON.$N$1];[.$T258];[$JSON.$O$1];[.$W258];[$JSON.$P$1];[.$A258];[$JSON.$Q$1];[.$B258];[$JSON.$R$1])" office:value-type="string" office:string-value="{&quot;id&quot;:&quot;3-29&quot;,&quot;name&quot;:&quot;朱舜水&quot;,&quot;kana&quot;:&quot;しゅしゅんすい&quot;,&quot;traitText&quot;:null,&quot;ruleText&quot;:&quot;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quot;,&quot;legacyText&quot;:&quot;木霊&quot;,&quot;imageUrl&quot;:&quot;https://one-draw.jp/ijinden/cardlist/003/card/03_029.png&quot;,&quot;expansion&quot;:35,&quot;rarity&quot;:1,&quot;type&quot;:1,&quot;level&quot;:4,&quot;color&quot;:4,&quot;term&quot;:0,&quot;trait&quot;:0,&quot;legacy&quot;:8,&quot;orderTable&quot;:257,&quot;orderDeck&quot;:129}," calcext:value-type="string">
            <text:p>{"id":"3-29","name":"朱舜水","kana":"しゅしゅんすい","traitText":null,"ruleText":"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legacyText":"木霊","imageUrl":"https://one-draw.jp/ijinden/cardlist/003/card/03_029.png","expansion":35,"rarity":1,"type":1,"level":4,"color":4,"term":0,"trait":0,"legacy":8,"orderTable":257,"orderDeck":129},</text:p>
          </table:table-cell>
          <table:table-cell table:number-columns-repeated="16347"/>
        </table:table-row>
        <table:table-row table:style-name="ro2">
          <table:table-cell office:value-type="float" office:value="258" calcext:value-type="float">
            <text:p>258</text:p>
          </table:table-cell>
          <table:table-cell office:value-type="float" office:value="48" calcext:value-type="float">
            <text:p>48</text:p>
          </table:table-cell>
          <table:table-cell office:value-type="string" calcext:value-type="string">
            <text:p>3-30</text:p>
          </table:table-cell>
          <table:table-cell office:value-type="float" office:value="30" calcext:value-type="float">
            <text:p>30</text:p>
          </table:table-cell>
          <table:table-cell office:value-type="string" calcext:value-type="string">
            <text:p>井原西鶴</text:p>
          </table:table-cell>
          <table:table-cell office:value-type="string" calcext:value-type="string">
            <text:p>いはらさいかく</text:p>
          </table:table-cell>
          <table:table-cell office:value-type="string" calcext:value-type="string">
            <text:p>第３弾ブースターパック</text:p>
          </table:table-cell>
          <table:table-cell table:formula="of:=VLOOKUP([.G259];[$収録番号.$A$1:$収録番号.$B$9];2;0)" office:value-type="float" office:value="35" calcext:value-type="float">
            <text:p>35</text:p>
          </table:table-cell>
          <table:table-cell office:value-type="string" calcext:value-type="string">
            <text:p>N</text:p>
          </table:table-cell>
          <table:table-cell table:formula="of:=VLOOKUP([.I259];[$レアリティ番号.$A$1:$レアリティ番号.$B$4];2;0)" office:value-type="float" office:value="1" calcext:value-type="float">
            <text:p>1</text:p>
          </table:table-cell>
          <table:table-cell office:value-type="string" calcext:value-type="string">
            <text:p>イジン</text:p>
          </table:table-cell>
          <table:table-cell table:formula="of:=VLOOKUP([.K259];[$種類番号.$A$1:$種類番号.$B$4];2;0)" office:value-type="float" office:value="1" calcext:value-type="float">
            <text:p>1</text:p>
          </table:table-cell>
          <table:table-cell office:value-type="string" calcext:value-type="string">
            <text:p>緑</text:p>
          </table:table-cell>
          <table:table-cell table:formula="of:=VLOOKUP([.M25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59];[$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59];[$特性番号.$A$1:$特性番号.$B$8];2;0);0)" office:value-type="float" office:value="0" calcext:value-type="float">
            <text:p>0</text:p>
          </table:table-cell>
          <table:table-cell office:value-type="string" calcext:value-type="string">
            <text:p>執筆 - ハイケイか「美術」イジンが戦場に置かれたとき、これを寝かせて発動できる。自分の山札の上から1枚を裏のまま魔力ゾーンに置く。</text:p>
          </table:table-cell>
          <table:table-cell table:style-name="ce8" table:formula="of:=NA()" office:value-type="string" office:string-value="" calcext:value-type="error">
            <text:p>#N/A</text:p>
          </table:table-cell>
          <table:table-cell table:formula="of:=IFERROR(VLOOKUP([.$V259];[$遺業能力番号.$A$1:$遺業能力番号.$B$9];2;0);0)" office:value-type="float" office:value="0" calcext:value-type="float">
            <text:p>0</text:p>
          </table:table-cell>
          <table:table-cell office:value-type="string" calcext:value-type="string">
            <text:p>https://one-draw.jp/ijinden/cardlist/003/card/03_030.png</text:p>
          </table:table-cell>
          <table:table-cell table:formula="of:=CONCATENATE([$JSON.$A$1];[.$C259];[$JSON.$B$1];[.$E259];[$JSON.$C$1];[.$F259];[$JSON.$D$1];IF(ISNA([.$S259]);&quot;null&quot;;&quot;&quot;&quot;&quot;&amp;[.$S259]&amp;&quot;&quot;&quot;&quot;);[$JSON.$E$1];[.$U259];[$JSON.$F$1];IF(ISNA([.$V259]);&quot;null&quot;;&quot;&quot;&quot;&quot;&amp;[.$V259]&amp;&quot;&quot;&quot;&quot;);[$JSON.$G$1];[.$X259];[$JSON.$H$1];[.$H259];[$JSON.$I$1];[.J259];[$JSON.$J$1];[.$L259];[$JSON.$K$1];[.$O259];[$JSON.$L$1];[.$N259];[$JSON.$M$1];[.$R259];[$JSON.$N$1];[.$T259];[$JSON.$O$1];[.$W259];[$JSON.$P$1];[.$A259];[$JSON.$Q$1];[.$B259];[$JSON.$R$1])" office:value-type="string" office:string-value="{&quot;id&quot;:&quot;3-30&quot;,&quot;name&quot;:&quot;井原西鶴&quot;,&quot;kana&quot;:&quot;いはらさいかく&quot;,&quot;traitText&quot;:null,&quot;ruleText&quot;:&quot;執筆 - ハイケイか「美術」イジンが戦場に置かれたとき、これを寝かせて発動できる。自分の山札の上から1枚を裏のまま魔力ゾーンに置く。&quot;,&quot;legacyText&quot;:null,&quot;imageUrl&quot;:&quot;https://one-draw.jp/ijinden/cardlist/003/card/03_030.png&quot;,&quot;expansion&quot;:35,&quot;rarity&quot;:1,&quot;type&quot;:1,&quot;level&quot;:2,&quot;color&quot;:4,&quot;term&quot;:2,&quot;trait&quot;:0,&quot;legacy&quot;:0,&quot;orderTable&quot;:258,&quot;orderDeck&quot;:48}," calcext:value-type="string">
            <text:p>{"id":"3-30","name":"井原西鶴","kana":"いはらさいかく","traitText":null,"ruleText":"執筆 - ハイケイか「美術」イジンが戦場に置かれたとき、これを寝かせて発動できる。自分の山札の上から1枚を裏のまま魔力ゾーンに置く。","legacyText":null,"imageUrl":"https://one-draw.jp/ijinden/cardlist/003/card/03_030.png","expansion":35,"rarity":1,"type":1,"level":2,"color":4,"term":2,"trait":0,"legacy":0,"orderTable":258,"orderDeck":48},</text:p>
          </table:table-cell>
          <table:table-cell table:number-columns-repeated="16347"/>
        </table:table-row>
        <table:table-row table:style-name="ro2">
          <table:table-cell office:value-type="float" office:value="259" calcext:value-type="float">
            <text:p>259</text:p>
          </table:table-cell>
          <table:table-cell office:value-type="float" office:value="231" calcext:value-type="float">
            <text:p>231</text:p>
          </table:table-cell>
          <table:table-cell office:value-type="string" calcext:value-type="string">
            <text:p>3-31</text:p>
          </table:table-cell>
          <table:table-cell office:value-type="float" office:value="31" calcext:value-type="float">
            <text:p>31</text:p>
          </table:table-cell>
          <table:table-cell office:value-type="string" calcext:value-type="string">
            <text:p>近松門左衛門</text:p>
          </table:table-cell>
          <table:table-cell office:value-type="string" calcext:value-type="string">
            <text:p>ちかまつもんざえもん</text:p>
          </table:table-cell>
          <table:table-cell office:value-type="string" calcext:value-type="string">
            <text:p>第３弾ブースターパック</text:p>
          </table:table-cell>
          <table:table-cell table:formula="of:=VLOOKUP([.G260];[$収録番号.$A$1:$収録番号.$B$9];2;0)" office:value-type="float" office:value="35" calcext:value-type="float">
            <text:p>35</text:p>
          </table:table-cell>
          <table:table-cell office:value-type="string" calcext:value-type="string">
            <text:p>R</text:p>
          </table:table-cell>
          <table:table-cell table:formula="of:=VLOOKUP([.I260];[$レアリティ番号.$A$1:$レアリティ番号.$B$4];2;0)" office:value-type="float" office:value="2" calcext:value-type="float">
            <text:p>2</text:p>
          </table:table-cell>
          <table:table-cell office:value-type="string" calcext:value-type="string">
            <text:p>イジン</text:p>
          </table:table-cell>
          <table:table-cell table:formula="of:=VLOOKUP([.K260];[$種類番号.$A$1:$種類番号.$B$4];2;0)" office:value-type="float" office:value="1" calcext:value-type="float">
            <text:p>1</text:p>
          </table:table-cell>
          <table:table-cell office:value-type="string" calcext:value-type="string">
            <text:p>緑</text:p>
          </table:table-cell>
          <table:table-cell table:formula="of:=VLOOKUP([.M260];[$色番号.$A$1:$色番号.$B$10];2;0)" office:value-type="float" office:value="4" calcext:value-type="float">
            <text:p>4</text:p>
          </table:table-cell>
          <table:table-cell office:value-type="float" office:value="9" calcext:value-type="float">
            <text:p>9</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60];[$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60];[$特性番号.$A$1:$特性番号.$B$8];2;0);0)" office:value-type="float" office:value="0" calcext:value-type="float">
            <text:p>0</text:p>
          </table:table-cell>
          <table:table-cell office:value-type="string" calcext:value-type="string">
            <text:p>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text:p>
          </table:table-cell>
          <table:table-cell table:style-name="ce8" table:formula="of:=NA()" office:value-type="string" office:string-value="" calcext:value-type="error">
            <text:p>#N/A</text:p>
          </table:table-cell>
          <table:table-cell table:formula="of:=IFERROR(VLOOKUP([.$V260];[$遺業能力番号.$A$1:$遺業能力番号.$B$9];2;0);0)" office:value-type="float" office:value="0" calcext:value-type="float">
            <text:p>0</text:p>
          </table:table-cell>
          <table:table-cell office:value-type="string" calcext:value-type="string">
            <text:p>https://one-draw.jp/ijinden/cardlist/003/card/03_031.png</text:p>
          </table:table-cell>
          <table:table-cell table:formula="of:=CONCATENATE([$JSON.$A$1];[.$C260];[$JSON.$B$1];[.$E260];[$JSON.$C$1];[.$F260];[$JSON.$D$1];IF(ISNA([.$S260]);&quot;null&quot;;&quot;&quot;&quot;&quot;&amp;[.$S260]&amp;&quot;&quot;&quot;&quot;);[$JSON.$E$1];[.$U260];[$JSON.$F$1];IF(ISNA([.$V260]);&quot;null&quot;;&quot;&quot;&quot;&quot;&amp;[.$V260]&amp;&quot;&quot;&quot;&quot;);[$JSON.$G$1];[.$X260];[$JSON.$H$1];[.$H260];[$JSON.$I$1];[.J260];[$JSON.$J$1];[.$L260];[$JSON.$K$1];[.$O260];[$JSON.$L$1];[.$N260];[$JSON.$M$1];[.$R260];[$JSON.$N$1];[.$T260];[$JSON.$O$1];[.$W260];[$JSON.$P$1];[.$A260];[$JSON.$Q$1];[.$B260];[$JSON.$R$1])" office:value-type="string" office:string-value="{&quot;id&quot;:&quot;3-31&quot;,&quot;name&quot;:&quot;近松門左衛門&quot;,&quot;kana&quot;:&quot;ちかまつもんざえもん&quot;,&quot;traitText&quot;:null,&quot;ruleText&quot;:&quot;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quot;,&quot;legacyText&quot;:null,&quot;imageUrl&quot;:&quot;https://one-draw.jp/ijinden/cardlist/003/card/03_031.png&quot;,&quot;expansion&quot;:35,&quot;rarity&quot;:2,&quot;type&quot;:1,&quot;level&quot;:9,&quot;color&quot;:4,&quot;term&quot;:2,&quot;trait&quot;:0,&quot;legacy&quot;:0,&quot;orderTable&quot;:259,&quot;orderDeck&quot;:231}," calcext:value-type="string">
            <text:p>{"id":"3-31","name":"近松門左衛門","kana":"ちかまつもんざえもん","traitText":null,"ruleText":"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legacyText":null,"imageUrl":"https://one-draw.jp/ijinden/cardlist/003/card/03_031.png","expansion":35,"rarity":2,"type":1,"level":9,"color":4,"term":2,"trait":0,"legacy":0,"orderTable":259,"orderDeck":231},</text:p>
          </table:table-cell>
          <table:table-cell table:number-columns-repeated="16347"/>
        </table:table-row>
        <table:table-row table:style-name="ro2">
          <table:table-cell office:value-type="float" office:value="260" calcext:value-type="float">
            <text:p>260</text:p>
          </table:table-cell>
          <table:table-cell office:value-type="float" office:value="14" calcext:value-type="float">
            <text:p>14</text:p>
          </table:table-cell>
          <table:table-cell office:value-type="string" calcext:value-type="string">
            <text:p>3-32</text:p>
          </table:table-cell>
          <table:table-cell office:value-type="float" office:value="32" calcext:value-type="float">
            <text:p>32</text:p>
          </table:table-cell>
          <table:table-cell office:value-type="string" calcext:value-type="string">
            <text:p>田沼意次</text:p>
          </table:table-cell>
          <table:table-cell office:value-type="string" calcext:value-type="string">
            <text:p>たぬまおきつぐ</text:p>
          </table:table-cell>
          <table:table-cell office:value-type="string" calcext:value-type="string">
            <text:p>第３弾ブースターパック</text:p>
          </table:table-cell>
          <table:table-cell table:formula="of:=VLOOKUP([.G261];[$収録番号.$A$1:$収録番号.$B$9];2;0)" office:value-type="float" office:value="35" calcext:value-type="float">
            <text:p>35</text:p>
          </table:table-cell>
          <table:table-cell office:value-type="string" calcext:value-type="string">
            <text:p>N</text:p>
          </table:table-cell>
          <table:table-cell table:formula="of:=VLOOKUP([.I261];[$レアリティ番号.$A$1:$レアリティ番号.$B$4];2;0)" office:value-type="float" office:value="1" calcext:value-type="float">
            <text:p>1</text:p>
          </table:table-cell>
          <table:table-cell office:value-type="string" calcext:value-type="string">
            <text:p>イジン</text:p>
          </table:table-cell>
          <table:table-cell table:formula="of:=VLOOKUP([.K261];[$種類番号.$A$1:$種類番号.$B$4];2;0)" office:value-type="float" office:value="1" calcext:value-type="float">
            <text:p>1</text:p>
          </table:table-cell>
          <table:table-cell office:value-type="string" calcext:value-type="string">
            <text:p>緑</text:p>
          </table:table-cell>
          <table:table-cell table:formula="of:=VLOOKUP([.M261];[$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61];[$特性番号.$A$1:$特性番号.$B$8];2;0);0)" office:value-type="float" office:value="0" calcext:value-type="float">
            <text:p>0</text:p>
          </table:table-cell>
          <table:table-cell office:value-type="string" calcext:value-type="string">
            <text:p>パワー3000以上の間「自分のメインフェイズが開始したとき、マリョク配置権+1する」を得る。</text:p>
          </table:table-cell>
          <table:table-cell table:style-name="ce8" table:formula="of:=NA()" office:value-type="string" office:string-value="" calcext:value-type="error">
            <text:p>#N/A</text:p>
          </table:table-cell>
          <table:table-cell table:formula="of:=IFERROR(VLOOKUP([.$V261];[$遺業能力番号.$A$1:$遺業能力番号.$B$9];2;0);0)" office:value-type="float" office:value="0" calcext:value-type="float">
            <text:p>0</text:p>
          </table:table-cell>
          <table:table-cell office:value-type="string" calcext:value-type="string">
            <text:p>https://one-draw.jp/ijinden/cardlist/003/card/03_032.png</text:p>
          </table:table-cell>
          <table:table-cell table:formula="of:=CONCATENATE([$JSON.$A$1];[.$C261];[$JSON.$B$1];[.$E261];[$JSON.$C$1];[.$F261];[$JSON.$D$1];IF(ISNA([.$S261]);&quot;null&quot;;&quot;&quot;&quot;&quot;&amp;[.$S261]&amp;&quot;&quot;&quot;&quot;);[$JSON.$E$1];[.$U261];[$JSON.$F$1];IF(ISNA([.$V261]);&quot;null&quot;;&quot;&quot;&quot;&quot;&amp;[.$V261]&amp;&quot;&quot;&quot;&quot;);[$JSON.$G$1];[.$X261];[$JSON.$H$1];[.$H261];[$JSON.$I$1];[.J261];[$JSON.$J$1];[.$L261];[$JSON.$K$1];[.$O261];[$JSON.$L$1];[.$N261];[$JSON.$M$1];[.$R261];[$JSON.$N$1];[.$T261];[$JSON.$O$1];[.$W261];[$JSON.$P$1];[.$A261];[$JSON.$Q$1];[.$B261];[$JSON.$R$1])" office:value-type="string" office:string-value="{&quot;id&quot;:&quot;3-32&quot;,&quot;name&quot;:&quot;田沼意次&quot;,&quot;kana&quot;:&quot;たぬまおきつぐ&quot;,&quot;traitText&quot;:null,&quot;ruleText&quot;:&quot;パワー3000以上の間「自分のメインフェイズが開始したとき、マリョク配置権+1する」を得る。&quot;,&quot;legacyText&quot;:null,&quot;imageUrl&quot;:&quot;https://one-draw.jp/ijinden/cardlist/003/card/03_032.png&quot;,&quot;expansion&quot;:35,&quot;rarity&quot;:1,&quot;type&quot;:1,&quot;level&quot;:1,&quot;color&quot;:4,&quot;term&quot;:0,&quot;trait&quot;:0,&quot;legacy&quot;:0,&quot;orderTable&quot;:260,&quot;orderDeck&quot;:14}," calcext:value-type="string">
            <text:p>{"id":"3-32","name":"田沼意次","kana":"たぬまおきつぐ","traitText":null,"ruleText":"パワー3000以上の間「自分のメインフェイズが開始したとき、マリョク配置権+1する」を得る。","legacyText":null,"imageUrl":"https://one-draw.jp/ijinden/cardlist/003/card/03_032.png","expansion":35,"rarity":1,"type":1,"level":1,"color":4,"term":0,"trait":0,"legacy":0,"orderTable":260,"orderDeck":14},</text:p>
          </table:table-cell>
          <table:table-cell table:number-columns-repeated="16347"/>
        </table:table-row>
        <table:table-row table:style-name="ro2">
          <table:table-cell office:value-type="float" office:value="261" calcext:value-type="float">
            <text:p>261</text:p>
          </table:table-cell>
          <table:table-cell office:value-type="float" office:value="49" calcext:value-type="float">
            <text:p>49</text:p>
          </table:table-cell>
          <table:table-cell office:value-type="string" calcext:value-type="string">
            <text:p>3-33</text:p>
          </table:table-cell>
          <table:table-cell office:value-type="float" office:value="33" calcext:value-type="float">
            <text:p>33</text:p>
          </table:table-cell>
          <table:table-cell office:value-type="string" calcext:value-type="string">
            <text:p>高野長英</text:p>
          </table:table-cell>
          <table:table-cell office:value-type="string" calcext:value-type="string">
            <text:p>たかのちょうえい</text:p>
          </table:table-cell>
          <table:table-cell office:value-type="string" calcext:value-type="string">
            <text:p>第３弾ブースターパック</text:p>
          </table:table-cell>
          <table:table-cell table:formula="of:=VLOOKUP([.G262];[$収録番号.$A$1:$収録番号.$B$9];2;0)" office:value-type="float" office:value="35" calcext:value-type="float">
            <text:p>35</text:p>
          </table:table-cell>
          <table:table-cell office:value-type="string" calcext:value-type="string">
            <text:p>N</text:p>
          </table:table-cell>
          <table:table-cell table:formula="of:=VLOOKUP([.I262];[$レアリティ番号.$A$1:$レアリティ番号.$B$4];2;0)" office:value-type="float" office:value="1" calcext:value-type="float">
            <text:p>1</text:p>
          </table:table-cell>
          <table:table-cell office:value-type="string" calcext:value-type="string">
            <text:p>イジン</text:p>
          </table:table-cell>
          <table:table-cell table:formula="of:=VLOOKUP([.K262];[$種類番号.$A$1:$種類番号.$B$4];2;0)" office:value-type="float" office:value="1" calcext:value-type="float">
            <text:p>1</text:p>
          </table:table-cell>
          <table:table-cell office:value-type="string" calcext:value-type="string">
            <text:p>緑</text:p>
          </table:table-cell>
          <table:table-cell table:formula="of:=VLOOKUP([.M262];[$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2];[$能力語番号.$A$1:$能力語番号.$B$10];2;0);0)" office:value-type="float" office:value="0" calcext:value-type="float">
            <text:p>0</text:p>
          </table:table-cell>
          <table:table-cell office:value-type="string" calcext:value-type="string">
            <text:p>医術</text:p>
          </table:table-cell>
          <table:table-cell table:formula="of:=IFERROR(VLOOKUP([.$S262];[$特性番号.$A$1:$特性番号.$B$8];2;0);0)" office:value-type="float" office:value="16" calcext:value-type="float">
            <text:p>16</text:p>
          </table:table-cell>
          <table:table-cell office:value-type="string" calcext:value-type="string">
            <text:p>相手のターンのブロックステップが開始したとき、自分の魔力ゾーンのカード1つを墓地に置いて発動できる。自分の戦場のカードすべてを起こす。</text:p>
          </table:table-cell>
          <table:table-cell table:style-name="ce8" office:value-type="string" calcext:value-type="string">
            <text:p>1ドローする</text:p>
          </table:table-cell>
          <table:table-cell table:formula="of:=IFERROR(VLOOKUP([.$V262];[$遺業能力番号.$A$1:$遺業能力番号.$B$9];2;0);0)" office:value-type="float" office:value="4" calcext:value-type="float">
            <text:p>4</text:p>
          </table:table-cell>
          <table:table-cell office:value-type="string" calcext:value-type="string">
            <text:p>https://one-draw.jp/ijinden/cardlist/003/card/03_033.png</text:p>
          </table:table-cell>
          <table:table-cell table:formula="of:=CONCATENATE([$JSON.$A$1];[.$C262];[$JSON.$B$1];[.$E262];[$JSON.$C$1];[.$F262];[$JSON.$D$1];IF(ISNA([.$S262]);&quot;null&quot;;&quot;&quot;&quot;&quot;&amp;[.$S262]&amp;&quot;&quot;&quot;&quot;);[$JSON.$E$1];[.$U262];[$JSON.$F$1];IF(ISNA([.$V262]);&quot;null&quot;;&quot;&quot;&quot;&quot;&amp;[.$V262]&amp;&quot;&quot;&quot;&quot;);[$JSON.$G$1];[.$X262];[$JSON.$H$1];[.$H262];[$JSON.$I$1];[.J262];[$JSON.$J$1];[.$L262];[$JSON.$K$1];[.$O262];[$JSON.$L$1];[.$N262];[$JSON.$M$1];[.$R262];[$JSON.$N$1];[.$T262];[$JSON.$O$1];[.$W262];[$JSON.$P$1];[.$A262];[$JSON.$Q$1];[.$B262];[$JSON.$R$1])" office:value-type="string" office:string-value="{&quot;id&quot;:&quot;3-33&quot;,&quot;name&quot;:&quot;高野長英&quot;,&quot;kana&quot;:&quot;たかのちょうえい&quot;,&quot;traitText&quot;:&quot;医術&quot;,&quot;ruleText&quot;:&quot;相手のターンのブロックステップが開始したとき、自分の魔力ゾーンのカード1つを墓地に置いて発動できる。自分の戦場のカードすべてを起こす。&quot;,&quot;legacyText&quot;:&quot;1ドローする&quot;,&quot;imageUrl&quot;:&quot;https://one-draw.jp/ijinden/cardlist/003/card/03_033.png&quot;,&quot;expansion&quot;:35,&quot;rarity&quot;:1,&quot;type&quot;:1,&quot;level&quot;:2,&quot;color&quot;:4,&quot;term&quot;:0,&quot;trait&quot;:16,&quot;legacy&quot;:4,&quot;orderTable&quot;:261,&quot;orderDeck&quot;:49}," calcext:value-type="string">
            <text:p>{"id":"3-33","name":"高野長英","kana":"たかのちょうえい","traitText":"医術","ruleText":"相手のターンのブロックステップが開始したとき、自分の魔力ゾーンのカード1つを墓地に置いて発動できる。自分の戦場のカードすべてを起こす。","legacyText":"1ドローする","imageUrl":"https://one-draw.jp/ijinden/cardlist/003/card/03_033.png","expansion":35,"rarity":1,"type":1,"level":2,"color":4,"term":0,"trait":16,"legacy":4,"orderTable":261,"orderDeck":49},</text:p>
          </table:table-cell>
          <table:table-cell table:number-columns-repeated="16347"/>
        </table:table-row>
        <table:table-row table:style-name="ro2">
          <table:table-cell office:value-type="float" office:value="262" calcext:value-type="float">
            <text:p>262</text:p>
          </table:table-cell>
          <table:table-cell office:value-type="float" office:value="195" calcext:value-type="float">
            <text:p>195</text:p>
          </table:table-cell>
          <table:table-cell office:value-type="string" calcext:value-type="string">
            <text:p>3-34</text:p>
          </table:table-cell>
          <table:table-cell office:value-type="float" office:value="34" calcext:value-type="float">
            <text:p>34</text:p>
          </table:table-cell>
          <table:table-cell office:value-type="string" calcext:value-type="string">
            <text:p>菱川師宣</text:p>
          </table:table-cell>
          <table:table-cell office:value-type="string" calcext:value-type="string">
            <text:p>ひしかわもろのぶ</text:p>
          </table:table-cell>
          <table:table-cell office:value-type="string" calcext:value-type="string">
            <text:p>第３弾ブースターパック</text:p>
          </table:table-cell>
          <table:table-cell table:formula="of:=VLOOKUP([.G263];[$収録番号.$A$1:$収録番号.$B$9];2;0)" office:value-type="float" office:value="35" calcext:value-type="float">
            <text:p>35</text:p>
          </table:table-cell>
          <table:table-cell office:value-type="string" calcext:value-type="string">
            <text:p>N</text:p>
          </table:table-cell>
          <table:table-cell table:formula="of:=VLOOKUP([.I263];[$レアリティ番号.$A$1:$レアリティ番号.$B$4];2;0)" office:value-type="float" office:value="1" calcext:value-type="float">
            <text:p>1</text:p>
          </table:table-cell>
          <table:table-cell office:value-type="string" calcext:value-type="string">
            <text:p>イジン</text:p>
          </table:table-cell>
          <table:table-cell table:formula="of:=VLOOKUP([.K263];[$種類番号.$A$1:$種類番号.$B$4];2;0)" office:value-type="float" office:value="1" calcext:value-type="float">
            <text:p>1</text:p>
          </table:table-cell>
          <table:table-cell office:value-type="string" calcext:value-type="string">
            <text:p>緑</text:p>
          </table:table-cell>
          <table:table-cell table:formula="of:=VLOOKUP([.M263];[$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3];[$能力語番号.$A$1:$能力語番号.$B$10];2;0);0)" office:value-type="float" office:value="0" calcext:value-type="float">
            <text:p>0</text:p>
          </table:table-cell>
          <table:table-cell office:value-type="string" calcext:value-type="string">
            <text:p>美術</text:p>
          </table:table-cell>
          <table:table-cell table:formula="of:=IFERROR(VLOOKUP([.$S263];[$特性番号.$A$1:$特性番号.$B$8];2;0);0)" office:value-type="float" office:value="2" calcext:value-type="float">
            <text:p>2</text:p>
          </table:table-cell>
          <table:table-cell office:value-type="string" calcext:value-type="string">
            <text:p>「執筆」を持つイジンが自分の戦場に置かれたとき、これを寝かせて発動できる。イジン召喚権+1する。</text:p>
          </table:table-cell>
          <table:table-cell table:style-name="ce8" office:value-type="string" calcext:value-type="string">
            <text:p>魔力化</text:p>
          </table:table-cell>
          <table:table-cell table:formula="of:=IFERROR(VLOOKUP([.$V263];[$遺業能力番号.$A$1:$遺業能力番号.$B$9];2;0);0)" office:value-type="float" office:value="1" calcext:value-type="float">
            <text:p>1</text:p>
          </table:table-cell>
          <table:table-cell office:value-type="string" calcext:value-type="string">
            <text:p>https://one-draw.jp/ijinden/cardlist/003/card/03_034.png</text:p>
          </table:table-cell>
          <table:table-cell table:formula="of:=CONCATENATE([$JSON.$A$1];[.$C263];[$JSON.$B$1];[.$E263];[$JSON.$C$1];[.$F263];[$JSON.$D$1];IF(ISNA([.$S263]);&quot;null&quot;;&quot;&quot;&quot;&quot;&amp;[.$S263]&amp;&quot;&quot;&quot;&quot;);[$JSON.$E$1];[.$U263];[$JSON.$F$1];IF(ISNA([.$V263]);&quot;null&quot;;&quot;&quot;&quot;&quot;&amp;[.$V263]&amp;&quot;&quot;&quot;&quot;);[$JSON.$G$1];[.$X263];[$JSON.$H$1];[.$H263];[$JSON.$I$1];[.J263];[$JSON.$J$1];[.$L263];[$JSON.$K$1];[.$O263];[$JSON.$L$1];[.$N263];[$JSON.$M$1];[.$R263];[$JSON.$N$1];[.$T263];[$JSON.$O$1];[.$W263];[$JSON.$P$1];[.$A263];[$JSON.$Q$1];[.$B263];[$JSON.$R$1])" office:value-type="string" office:string-value="{&quot;id&quot;:&quot;3-34&quot;,&quot;name&quot;:&quot;菱川師宣&quot;,&quot;kana&quot;:&quot;ひしかわもろのぶ&quot;,&quot;traitText&quot;:&quot;美術&quot;,&quot;ruleText&quot;:&quot;「執筆」を持つイジンが自分の戦場に置かれたとき、これを寝かせて発動できる。イジン召喚権+1する。&quot;,&quot;legacyText&quot;:&quot;魔力化&quot;,&quot;imageUrl&quot;:&quot;https://one-draw.jp/ijinden/cardlist/003/card/03_034.png&quot;,&quot;expansion&quot;:35,&quot;rarity&quot;:1,&quot;type&quot;:1,&quot;level&quot;:6,&quot;color&quot;:4,&quot;term&quot;:0,&quot;trait&quot;:2,&quot;legacy&quot;:1,&quot;orderTable&quot;:262,&quot;orderDeck&quot;:195}," calcext:value-type="string">
            <text:p>{"id":"3-34","name":"菱川師宣","kana":"ひしかわもろのぶ","traitText":"美術","ruleText":"「執筆」を持つイジンが自分の戦場に置かれたとき、これを寝かせて発動できる。イジン召喚権+1する。","legacyText":"魔力化","imageUrl":"https://one-draw.jp/ijinden/cardlist/003/card/03_034.png","expansion":35,"rarity":1,"type":1,"level":6,"color":4,"term":0,"trait":2,"legacy":1,"orderTable":262,"orderDeck":195},</text:p>
          </table:table-cell>
          <table:table-cell table:number-columns-repeated="16347"/>
        </table:table-row>
        <table:table-row table:style-name="ro2">
          <table:table-cell office:value-type="float" office:value="263" calcext:value-type="float">
            <text:p>263</text:p>
          </table:table-cell>
          <table:table-cell office:value-type="float" office:value="175" calcext:value-type="float">
            <text:p>175</text:p>
          </table:table-cell>
          <table:table-cell office:value-type="string" calcext:value-type="string">
            <text:p>3-35</text:p>
          </table:table-cell>
          <table:table-cell office:value-type="float" office:value="35" calcext:value-type="float">
            <text:p>35</text:p>
          </table:table-cell>
          <table:table-cell office:value-type="string" calcext:value-type="string">
            <text:p>徳川吉宗</text:p>
          </table:table-cell>
          <table:table-cell office:value-type="string" calcext:value-type="string">
            <text:p>とくがわよしむね</text:p>
          </table:table-cell>
          <table:table-cell office:value-type="string" calcext:value-type="string">
            <text:p>第３弾ブースターパック</text:p>
          </table:table-cell>
          <table:table-cell table:formula="of:=VLOOKUP([.G264];[$収録番号.$A$1:$収録番号.$B$9];2;0)" office:value-type="float" office:value="35" calcext:value-type="float">
            <text:p>35</text:p>
          </table:table-cell>
          <table:table-cell office:value-type="string" calcext:value-type="string">
            <text:p>R</text:p>
          </table:table-cell>
          <table:table-cell table:formula="of:=VLOOKUP([.I264];[$レアリティ番号.$A$1:$レアリティ番号.$B$4];2;0)" office:value-type="float" office:value="2" calcext:value-type="float">
            <text:p>2</text:p>
          </table:table-cell>
          <table:table-cell office:value-type="string" calcext:value-type="string">
            <text:p>イジン</text:p>
          </table:table-cell>
          <table:table-cell table:formula="of:=VLOOKUP([.K264];[$種類番号.$A$1:$種類番号.$B$4];2;0)" office:value-type="float" office:value="1" calcext:value-type="float">
            <text:p>1</text:p>
          </table:table-cell>
          <table:table-cell office:value-type="string" calcext:value-type="string">
            <text:p>黄</text:p>
          </table:table-cell>
          <table:table-cell table:formula="of:=VLOOKUP([.M264];[$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64];[$特性番号.$A$1:$特性番号.$B$8];2;0);0)" office:value-type="float" office:value="0" calcext:value-type="float">
            <text:p>0</text:p>
          </table:table-cell>
          <table:table-cell office:value-type="string" calcext:value-type="string">
            <text:p>スタンド¶戦場に置かれたとき、戦場のハイケイ1つか、装備されているカード1つを指定して発動できる。それを山札の下に戻す。¶自分のエンドフェイズが開始したとき、これを山札の下に戻す。</text:p>
          </table:table-cell>
          <table:table-cell table:style-name="ce8" office:value-type="string" calcext:value-type="string">
            <text:p>反魂</text:p>
          </table:table-cell>
          <table:table-cell table:formula="of:=IFERROR(VLOOKUP([.$V264];[$遺業能力番号.$A$1:$遺業能力番号.$B$9];2;0);0)" office:value-type="float" office:value="6" calcext:value-type="float">
            <text:p>6</text:p>
          </table:table-cell>
          <table:table-cell office:value-type="string" calcext:value-type="string">
            <text:p>https://one-draw.jp/ijinden/cardlist/003/card/03_035.png</text:p>
          </table:table-cell>
          <table:table-cell table:formula="of:=CONCATENATE([$JSON.$A$1];[.$C264];[$JSON.$B$1];[.$E264];[$JSON.$C$1];[.$F264];[$JSON.$D$1];IF(ISNA([.$S264]);&quot;null&quot;;&quot;&quot;&quot;&quot;&amp;[.$S264]&amp;&quot;&quot;&quot;&quot;);[$JSON.$E$1];[.$U264];[$JSON.$F$1];IF(ISNA([.$V264]);&quot;null&quot;;&quot;&quot;&quot;&quot;&amp;[.$V264]&amp;&quot;&quot;&quot;&quot;);[$JSON.$G$1];[.$X264];[$JSON.$H$1];[.$H264];[$JSON.$I$1];[.J264];[$JSON.$J$1];[.$L264];[$JSON.$K$1];[.$O264];[$JSON.$L$1];[.$N264];[$JSON.$M$1];[.$R264];[$JSON.$N$1];[.$T264];[$JSON.$O$1];[.$W264];[$JSON.$P$1];[.$A264];[$JSON.$Q$1];[.$B264];[$JSON.$R$1])" office:value-type="string" office:string-value="{&quot;id&quot;:&quot;3-35&quot;,&quot;name&quot;:&quot;徳川吉宗&quot;,&quot;kana&quot;:&quot;とくがわよしむね&quot;,&quot;traitText&quot;:null,&quot;ruleText&quot;:&quot;スタンド¶戦場に置かれたとき、戦場のハイケイ1つか、装備されているカード1つを指定して発動できる。それを山札の下に戻す。¶自分のエンドフェイズが開始したとき、これを山札の下に戻す。&quot;,&quot;legacyText&quot;:&quot;反魂&quot;,&quot;imageUrl&quot;:&quot;https://one-draw.jp/ijinden/cardlist/003/card/03_035.png&quot;,&quot;expansion&quot;:35,&quot;rarity&quot;:2,&quot;type&quot;:1,&quot;level&quot;:5,&quot;color&quot;:8,&quot;term&quot;:0,&quot;trait&quot;:0,&quot;legacy&quot;:6,&quot;orderTable&quot;:263,&quot;orderDeck&quot;:175}," calcext:value-type="string">
            <text:p>{"id":"3-35","name":"徳川吉宗","kana":"とくがわよしむね","traitText":null,"ruleText":"スタンド¶戦場に置かれたとき、戦場のハイケイ1つか、装備されているカード1つを指定して発動できる。それを山札の下に戻す。¶自分のエンドフェイズが開始したとき、これを山札の下に戻す。","legacyText":"反魂","imageUrl":"https://one-draw.jp/ijinden/cardlist/003/card/03_035.png","expansion":35,"rarity":2,"type":1,"level":5,"color":8,"term":0,"trait":0,"legacy":6,"orderTable":263,"orderDeck":175},</text:p>
          </table:table-cell>
          <table:table-cell table:number-columns-repeated="16347"/>
        </table:table-row>
        <table:table-row table:style-name="ro2">
          <table:table-cell office:value-type="float" office:value="264" calcext:value-type="float">
            <text:p>264</text:p>
          </table:table-cell>
          <table:table-cell office:value-type="float" office:value="19" calcext:value-type="float">
            <text:p>19</text:p>
          </table:table-cell>
          <table:table-cell office:value-type="string" calcext:value-type="string">
            <text:p>3-36</text:p>
          </table:table-cell>
          <table:table-cell office:value-type="float" office:value="36" calcext:value-type="float">
            <text:p>36</text:p>
          </table:table-cell>
          <table:table-cell office:value-type="string" calcext:value-type="string">
            <text:p>雪舟</text:p>
          </table:table-cell>
          <table:table-cell office:value-type="string" calcext:value-type="string">
            <text:p>せっしゅう</text:p>
          </table:table-cell>
          <table:table-cell office:value-type="string" calcext:value-type="string">
            <text:p>第３弾ブースターパック</text:p>
          </table:table-cell>
          <table:table-cell table:formula="of:=VLOOKUP([.G265];[$収録番号.$A$1:$収録番号.$B$9];2;0)" office:value-type="float" office:value="35" calcext:value-type="float">
            <text:p>35</text:p>
          </table:table-cell>
          <table:table-cell office:value-type="string" calcext:value-type="string">
            <text:p>N</text:p>
          </table:table-cell>
          <table:table-cell table:formula="of:=VLOOKUP([.I265];[$レアリティ番号.$A$1:$レアリティ番号.$B$4];2;0)" office:value-type="float" office:value="1" calcext:value-type="float">
            <text:p>1</text:p>
          </table:table-cell>
          <table:table-cell office:value-type="string" calcext:value-type="string">
            <text:p>イジン</text:p>
          </table:table-cell>
          <table:table-cell table:formula="of:=VLOOKUP([.K265];[$種類番号.$A$1:$種類番号.$B$4];2;0)" office:value-type="float" office:value="1" calcext:value-type="float">
            <text:p>1</text:p>
          </table:table-cell>
          <table:table-cell office:value-type="string" calcext:value-type="string">
            <text:p>黄</text:p>
          </table:table-cell>
          <table:table-cell table:formula="of:=VLOOKUP([.M265];[$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5];[$能力語番号.$A$1:$能力語番号.$B$10];2;0);0)" office:value-type="float" office:value="0" calcext:value-type="float">
            <text:p>0</text:p>
          </table:table-cell>
          <table:table-cell office:value-type="string" calcext:value-type="string">
            <text:p>美術</text:p>
          </table:table-cell>
          <table:table-cell table:formula="of:=IFERROR(VLOOKUP([.$S265];[$特性番号.$A$1:$特性番号.$B$8];2;0);0)" office:value-type="float" office:value="2" calcext:value-type="float">
            <text:p>2</text:p>
          </table:table-cell>
          <table:table-cell office:value-type="string" calcext:value-type="string">
            <text:p>戦場に置かれたとき、自分の手札1枚を山札の下に戻して、1ドローする。</text:p>
          </table:table-cell>
          <table:table-cell table:style-name="ce8" office:value-type="string" calcext:value-type="string">
            <text:p>1ドローする</text:p>
          </table:table-cell>
          <table:table-cell table:formula="of:=IFERROR(VLOOKUP([.$V265];[$遺業能力番号.$A$1:$遺業能力番号.$B$9];2;0);0)" office:value-type="float" office:value="4" calcext:value-type="float">
            <text:p>4</text:p>
          </table:table-cell>
          <table:table-cell office:value-type="string" calcext:value-type="string">
            <text:p>https://one-draw.jp/ijinden/cardlist/003/card/03_036.png</text:p>
          </table:table-cell>
          <table:table-cell table:formula="of:=CONCATENATE([$JSON.$A$1];[.$C265];[$JSON.$B$1];[.$E265];[$JSON.$C$1];[.$F265];[$JSON.$D$1];IF(ISNA([.$S265]);&quot;null&quot;;&quot;&quot;&quot;&quot;&amp;[.$S265]&amp;&quot;&quot;&quot;&quot;);[$JSON.$E$1];[.$U265];[$JSON.$F$1];IF(ISNA([.$V265]);&quot;null&quot;;&quot;&quot;&quot;&quot;&amp;[.$V265]&amp;&quot;&quot;&quot;&quot;);[$JSON.$G$1];[.$X265];[$JSON.$H$1];[.$H265];[$JSON.$I$1];[.J265];[$JSON.$J$1];[.$L265];[$JSON.$K$1];[.$O265];[$JSON.$L$1];[.$N265];[$JSON.$M$1];[.$R265];[$JSON.$N$1];[.$T265];[$JSON.$O$1];[.$W265];[$JSON.$P$1];[.$A265];[$JSON.$Q$1];[.$B265];[$JSON.$R$1])" office:value-type="string" office:string-value="{&quot;id&quot;:&quot;3-36&quot;,&quot;name&quot;:&quot;雪舟&quot;,&quot;kana&quot;:&quot;せっしゅう&quot;,&quot;traitText&quot;:&quot;美術&quot;,&quot;ruleText&quot;:&quot;戦場に置かれたとき、自分の手札1枚を山札の下に戻して、1ドローする。&quot;,&quot;legacyText&quot;:&quot;1ドローする&quot;,&quot;imageUrl&quot;:&quot;https://one-draw.jp/ijinden/cardlist/003/card/03_036.png&quot;,&quot;expansion&quot;:35,&quot;rarity&quot;:1,&quot;type&quot;:1,&quot;level&quot;:1,&quot;color&quot;:8,&quot;term&quot;:0,&quot;trait&quot;:2,&quot;legacy&quot;:4,&quot;orderTable&quot;:264,&quot;orderDeck&quot;:19}," calcext:value-type="string">
            <text:p>{"id":"3-36","name":"雪舟","kana":"せっしゅう","traitText":"美術","ruleText":"戦場に置かれたとき、自分の手札1枚を山札の下に戻して、1ドローする。","legacyText":"1ドローする","imageUrl":"https://one-draw.jp/ijinden/cardlist/003/card/03_036.png","expansion":35,"rarity":1,"type":1,"level":1,"color":8,"term":0,"trait":2,"legacy":4,"orderTable":264,"orderDeck":19},</text:p>
          </table:table-cell>
          <table:table-cell table:number-columns-repeated="16347"/>
        </table:table-row>
        <table:table-row table:style-name="ro2">
          <table:table-cell office:value-type="float" office:value="265" calcext:value-type="float">
            <text:p>265</text:p>
          </table:table-cell>
          <table:table-cell office:value-type="float" office:value="198" calcext:value-type="float">
            <text:p>198</text:p>
          </table:table-cell>
          <table:table-cell office:value-type="string" calcext:value-type="string">
            <text:p>3-37</text:p>
          </table:table-cell>
          <table:table-cell office:value-type="float" office:value="37" calcext:value-type="float">
            <text:p>37</text:p>
          </table:table-cell>
          <table:table-cell office:value-type="string" calcext:value-type="string">
            <text:p>俵屋宗達</text:p>
          </table:table-cell>
          <table:table-cell office:value-type="string" calcext:value-type="string">
            <text:p>たわらやそうたつ</text:p>
          </table:table-cell>
          <table:table-cell office:value-type="string" calcext:value-type="string">
            <text:p>第３弾ブースターパック</text:p>
          </table:table-cell>
          <table:table-cell table:formula="of:=VLOOKUP([.G266];[$収録番号.$A$1:$収録番号.$B$9];2;0)" office:value-type="float" office:value="35" calcext:value-type="float">
            <text:p>35</text:p>
          </table:table-cell>
          <table:table-cell office:value-type="string" calcext:value-type="string">
            <text:p>N</text:p>
          </table:table-cell>
          <table:table-cell table:formula="of:=VLOOKUP([.I266];[$レアリティ番号.$A$1:$レアリティ番号.$B$4];2;0)" office:value-type="float" office:value="1" calcext:value-type="float">
            <text:p>1</text:p>
          </table:table-cell>
          <table:table-cell office:value-type="string" calcext:value-type="string">
            <text:p>イジン</text:p>
          </table:table-cell>
          <table:table-cell table:formula="of:=VLOOKUP([.K266];[$種類番号.$A$1:$種類番号.$B$4];2;0)" office:value-type="float" office:value="1" calcext:value-type="float">
            <text:p>1</text:p>
          </table:table-cell>
          <table:table-cell office:value-type="string" calcext:value-type="string">
            <text:p>黄</text:p>
          </table:table-cell>
          <table:table-cell table:formula="of:=VLOOKUP([.M266];[$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6];[$能力語番号.$A$1:$能力語番号.$B$10];2;0);0)" office:value-type="float" office:value="0" calcext:value-type="float">
            <text:p>0</text:p>
          </table:table-cell>
          <table:table-cell office:value-type="string" calcext:value-type="string">
            <text:p>美術</text:p>
          </table:table-cell>
          <table:table-cell table:formula="of:=IFERROR(VLOOKUP([.$S266];[$特性番号.$A$1:$特性番号.$B$8];2;0);0)" office:value-type="float" office:value="2" calcext:value-type="float">
            <text:p>2</text:p>
          </table:table-cell>
          <table:table-cell office:value-type="string" calcext:value-type="string">
            <text:p>これが戦場にいる間、自分の戦場のハイケイは「特性：美術」を得る。¶戦場に置かれたとき、戦場の「美術」ハイケイ1つを山札の上に戻して発動できる。イジン召喚権+1する。</text:p>
          </table:table-cell>
          <table:table-cell table:style-name="ce8" table:formula="of:=NA()" office:value-type="string" office:string-value="" calcext:value-type="error">
            <text:p>#N/A</text:p>
          </table:table-cell>
          <table:table-cell table:formula="of:=IFERROR(VLOOKUP([.$V266];[$遺業能力番号.$A$1:$遺業能力番号.$B$9];2;0);0)" office:value-type="float" office:value="0" calcext:value-type="float">
            <text:p>0</text:p>
          </table:table-cell>
          <table:table-cell office:value-type="string" calcext:value-type="string">
            <text:p>https://one-draw.jp/ijinden/cardlist/003/card/03_037.png</text:p>
          </table:table-cell>
          <table:table-cell table:formula="of:=CONCATENATE([$JSON.$A$1];[.$C266];[$JSON.$B$1];[.$E266];[$JSON.$C$1];[.$F266];[$JSON.$D$1];IF(ISNA([.$S266]);&quot;null&quot;;&quot;&quot;&quot;&quot;&amp;[.$S266]&amp;&quot;&quot;&quot;&quot;);[$JSON.$E$1];[.$U266];[$JSON.$F$1];IF(ISNA([.$V266]);&quot;null&quot;;&quot;&quot;&quot;&quot;&amp;[.$V266]&amp;&quot;&quot;&quot;&quot;);[$JSON.$G$1];[.$X266];[$JSON.$H$1];[.$H266];[$JSON.$I$1];[.J266];[$JSON.$J$1];[.$L266];[$JSON.$K$1];[.$O266];[$JSON.$L$1];[.$N266];[$JSON.$M$1];[.$R266];[$JSON.$N$1];[.$T266];[$JSON.$O$1];[.$W266];[$JSON.$P$1];[.$A266];[$JSON.$Q$1];[.$B266];[$JSON.$R$1])" office:value-type="string" office:string-value="{&quot;id&quot;:&quot;3-37&quot;,&quot;name&quot;:&quot;俵屋宗達&quot;,&quot;kana&quot;:&quot;たわらやそうたつ&quot;,&quot;traitText&quot;:&quot;美術&quot;,&quot;ruleText&quot;:&quot;これが戦場にいる間、自分の戦場のハイケイは「特性：美術」を得る。¶戦場に置かれたとき、戦場の「美術」ハイケイ1つを山札の上に戻して発動できる。イジン召喚権+1する。&quot;,&quot;legacyText&quot;:null,&quot;imageUrl&quot;:&quot;https://one-draw.jp/ijinden/cardlist/003/card/03_037.png&quot;,&quot;expansion&quot;:35,&quot;rarity&quot;:1,&quot;type&quot;:1,&quot;level&quot;:6,&quot;color&quot;:8,&quot;term&quot;:0,&quot;trait&quot;:2,&quot;legacy&quot;:0,&quot;orderTable&quot;:265,&quot;orderDeck&quot;:198}," calcext:value-type="string">
            <text:p>{"id":"3-37","name":"俵屋宗達","kana":"たわらやそうたつ","traitText":"美術","ruleText":"これが戦場にいる間、自分の戦場のハイケイは「特性：美術」を得る。¶戦場に置かれたとき、戦場の「美術」ハイケイ1つを山札の上に戻して発動できる。イジン召喚権+1する。","legacyText":null,"imageUrl":"https://one-draw.jp/ijinden/cardlist/003/card/03_037.png","expansion":35,"rarity":1,"type":1,"level":6,"color":8,"term":0,"trait":2,"legacy":0,"orderTable":265,"orderDeck":198},</text:p>
          </table:table-cell>
          <table:table-cell table:number-columns-repeated="16347"/>
        </table:table-row>
        <table:table-row table:style-name="ro2">
          <table:table-cell office:value-type="float" office:value="266" calcext:value-type="float">
            <text:p>266</text:p>
          </table:table-cell>
          <table:table-cell office:value-type="float" office:value="233" calcext:value-type="float">
            <text:p>233</text:p>
          </table:table-cell>
          <table:table-cell office:value-type="string" calcext:value-type="string">
            <text:p>3-38</text:p>
          </table:table-cell>
          <table:table-cell office:value-type="float" office:value="38" calcext:value-type="float">
            <text:p>38</text:p>
          </table:table-cell>
          <table:table-cell office:value-type="string" calcext:value-type="string">
            <text:p>司馬炎</text:p>
          </table:table-cell>
          <table:table-cell office:value-type="string" calcext:value-type="string">
            <text:p>しばえん</text:p>
          </table:table-cell>
          <table:table-cell office:value-type="string" calcext:value-type="string">
            <text:p>第３弾ブースターパック</text:p>
          </table:table-cell>
          <table:table-cell table:formula="of:=VLOOKUP([.G267];[$収録番号.$A$1:$収録番号.$B$9];2;0)" office:value-type="float" office:value="35" calcext:value-type="float">
            <text:p>35</text:p>
          </table:table-cell>
          <table:table-cell office:value-type="string" calcext:value-type="string">
            <text:p>N</text:p>
          </table:table-cell>
          <table:table-cell table:formula="of:=VLOOKUP([.I267];[$レアリティ番号.$A$1:$レアリティ番号.$B$4];2;0)" office:value-type="float" office:value="1" calcext:value-type="float">
            <text:p>1</text:p>
          </table:table-cell>
          <table:table-cell office:value-type="string" calcext:value-type="string">
            <text:p>イジン</text:p>
          </table:table-cell>
          <table:table-cell table:formula="of:=VLOOKUP([.K267];[$種類番号.$A$1:$種類番号.$B$4];2;0)" office:value-type="float" office:value="1" calcext:value-type="float">
            <text:p>1</text:p>
          </table:table-cell>
          <table:table-cell office:value-type="string" calcext:value-type="string">
            <text:p>黄</text:p>
          </table:table-cell>
          <table:table-cell table:formula="of:=VLOOKUP([.M267];[$色番号.$A$1:$色番号.$B$10];2;0)" office:value-type="float" office:value="8" calcext:value-type="float">
            <text:p>8</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67];[$特性番号.$A$1:$特性番号.$B$8];2;0);0)" office:value-type="float" office:value="0" calcext:value-type="float">
            <text:p>0</text:p>
          </table:table-cell>
          <table:table-cell office:value-type="string" calcext:value-type="string">
            <text:p>戦場に置かれたとき、自分の戦場のガーディアン1体につき、戦場のイジン1体を山札の下に戻す。</text:p>
          </table:table-cell>
          <table:table-cell table:style-name="ce8" office:value-type="string" calcext:value-type="string">
            <text:p>反魂</text:p>
          </table:table-cell>
          <table:table-cell table:formula="of:=IFERROR(VLOOKUP([.$V267];[$遺業能力番号.$A$1:$遺業能力番号.$B$9];2;0);0)" office:value-type="float" office:value="6" calcext:value-type="float">
            <text:p>6</text:p>
          </table:table-cell>
          <table:table-cell office:value-type="string" calcext:value-type="string">
            <text:p>https://one-draw.jp/ijinden/cardlist/003/card/03_038.png</text:p>
          </table:table-cell>
          <table:table-cell table:formula="of:=CONCATENATE([$JSON.$A$1];[.$C267];[$JSON.$B$1];[.$E267];[$JSON.$C$1];[.$F267];[$JSON.$D$1];IF(ISNA([.$S267]);&quot;null&quot;;&quot;&quot;&quot;&quot;&amp;[.$S267]&amp;&quot;&quot;&quot;&quot;);[$JSON.$E$1];[.$U267];[$JSON.$F$1];IF(ISNA([.$V267]);&quot;null&quot;;&quot;&quot;&quot;&quot;&amp;[.$V267]&amp;&quot;&quot;&quot;&quot;);[$JSON.$G$1];[.$X267];[$JSON.$H$1];[.$H267];[$JSON.$I$1];[.J267];[$JSON.$J$1];[.$L267];[$JSON.$K$1];[.$O267];[$JSON.$L$1];[.$N267];[$JSON.$M$1];[.$R267];[$JSON.$N$1];[.$T267];[$JSON.$O$1];[.$W267];[$JSON.$P$1];[.$A267];[$JSON.$Q$1];[.$B267];[$JSON.$R$1])" office:value-type="string" office:string-value="{&quot;id&quot;:&quot;3-38&quot;,&quot;name&quot;:&quot;司馬炎&quot;,&quot;kana&quot;:&quot;しばえん&quot;,&quot;traitText&quot;:null,&quot;ruleText&quot;:&quot;戦場に置かれたとき、自分の戦場のガーディアン1体につき、戦場のイジン1体を山札の下に戻す。&quot;,&quot;legacyText&quot;:&quot;反魂&quot;,&quot;imageUrl&quot;:&quot;https://one-draw.jp/ijinden/cardlist/003/card/03_038.png&quot;,&quot;expansion&quot;:35,&quot;rarity&quot;:1,&quot;type&quot;:1,&quot;level&quot;:9,&quot;color&quot;:8,&quot;term&quot;:0,&quot;trait&quot;:0,&quot;legacy&quot;:6,&quot;orderTable&quot;:266,&quot;orderDeck&quot;:233}," calcext:value-type="string">
            <text:p>{"id":"3-38","name":"司馬炎","kana":"しばえん","traitText":null,"ruleText":"戦場に置かれたとき、自分の戦場のガーディアン1体につき、戦場のイジン1体を山札の下に戻す。","legacyText":"反魂","imageUrl":"https://one-draw.jp/ijinden/cardlist/003/card/03_038.png","expansion":35,"rarity":1,"type":1,"level":9,"color":8,"term":0,"trait":0,"legacy":6,"orderTable":266,"orderDeck":233},</text:p>
          </table:table-cell>
          <table:table-cell table:number-columns-repeated="16347"/>
        </table:table-row>
        <table:table-row table:style-name="ro2">
          <table:table-cell office:value-type="float" office:value="267" calcext:value-type="float">
            <text:p>267</text:p>
          </table:table-cell>
          <table:table-cell office:value-type="float" office:value="227" calcext:value-type="float">
            <text:p>227</text:p>
          </table:table-cell>
          <table:table-cell office:value-type="string" calcext:value-type="string">
            <text:p>3-39</text:p>
          </table:table-cell>
          <table:table-cell office:value-type="float" office:value="39" calcext:value-type="float">
            <text:p>39</text:p>
          </table:table-cell>
          <table:table-cell office:value-type="string" calcext:value-type="string">
            <text:p>井伊直弼</text:p>
          </table:table-cell>
          <table:table-cell office:value-type="string" calcext:value-type="string">
            <text:p>いいなおすけ</text:p>
          </table:table-cell>
          <table:table-cell office:value-type="string" calcext:value-type="string">
            <text:p>第３弾ブースターパック</text:p>
          </table:table-cell>
          <table:table-cell table:formula="of:=VLOOKUP([.G268];[$収録番号.$A$1:$収録番号.$B$9];2;0)" office:value-type="float" office:value="35" calcext:value-type="float">
            <text:p>35</text:p>
          </table:table-cell>
          <table:table-cell office:value-type="string" calcext:value-type="string">
            <text:p>N</text:p>
          </table:table-cell>
          <table:table-cell table:formula="of:=VLOOKUP([.I268];[$レアリティ番号.$A$1:$レアリティ番号.$B$4];2;0)" office:value-type="float" office:value="1" calcext:value-type="float">
            <text:p>1</text:p>
          </table:table-cell>
          <table:table-cell office:value-type="string" calcext:value-type="string">
            <text:p>イジン</text:p>
          </table:table-cell>
          <table:table-cell table:formula="of:=VLOOKUP([.K268];[$種類番号.$A$1:$種類番号.$B$4];2;0)" office:value-type="float" office:value="1" calcext:value-type="float">
            <text:p>1</text:p>
          </table:table-cell>
          <table:table-cell office:value-type="string" calcext:value-type="string">
            <text:p>黄</text:p>
          </table:table-cell>
          <table:table-cell table:formula="of:=VLOOKUP([.M268];[$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68];[$特性番号.$A$1:$特性番号.$B$8];2;0);0)" office:value-type="float" office:value="0" calcext:value-type="float">
            <text:p>0</text:p>
          </table:table-cell>
          <table:table-cell office:value-type="string" calcext:value-type="string">
            <text:p>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text:p>
          </table:table-cell>
          <table:table-cell table:style-name="ce8" office:value-type="string" calcext:value-type="string">
            <text:p>魔力化</text:p>
          </table:table-cell>
          <table:table-cell table:formula="of:=IFERROR(VLOOKUP([.$V268];[$遺業能力番号.$A$1:$遺業能力番号.$B$9];2;0);0)" office:value-type="float" office:value="1" calcext:value-type="float">
            <text:p>1</text:p>
          </table:table-cell>
          <table:table-cell office:value-type="string" calcext:value-type="string">
            <text:p>https://one-draw.jp/ijinden/cardlist/003/card/03_039.png</text:p>
          </table:table-cell>
          <table:table-cell table:formula="of:=CONCATENATE([$JSON.$A$1];[.$C268];[$JSON.$B$1];[.$E268];[$JSON.$C$1];[.$F268];[$JSON.$D$1];IF(ISNA([.$S268]);&quot;null&quot;;&quot;&quot;&quot;&quot;&amp;[.$S268]&amp;&quot;&quot;&quot;&quot;);[$JSON.$E$1];[.$U268];[$JSON.$F$1];IF(ISNA([.$V268]);&quot;null&quot;;&quot;&quot;&quot;&quot;&amp;[.$V268]&amp;&quot;&quot;&quot;&quot;);[$JSON.$G$1];[.$X268];[$JSON.$H$1];[.$H268];[$JSON.$I$1];[.J268];[$JSON.$J$1];[.$L268];[$JSON.$K$1];[.$O268];[$JSON.$L$1];[.$N268];[$JSON.$M$1];[.$R268];[$JSON.$N$1];[.$T268];[$JSON.$O$1];[.$W268];[$JSON.$P$1];[.$A268];[$JSON.$Q$1];[.$B268];[$JSON.$R$1])" office:value-type="string" office:string-value="{&quot;id&quot;:&quot;3-39&quot;,&quot;name&quot;:&quot;井伊直弼&quot;,&quot;kana&quot;:&quot;いいなおすけ&quot;,&quot;traitText&quot;:null,&quot;ruleText&quot;:&quot;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quot;,&quot;legacyText&quot;:&quot;魔力化&quot;,&quot;imageUrl&quot;:&quot;https://one-draw.jp/ijinden/cardlist/003/card/03_039.png&quot;,&quot;expansion&quot;:35,&quot;rarity&quot;:1,&quot;type&quot;:1,&quot;level&quot;:8,&quot;color&quot;:8,&quot;term&quot;:0,&quot;trait&quot;:0,&quot;legacy&quot;:1,&quot;orderTable&quot;:267,&quot;orderDeck&quot;:227}," calcext:value-type="string">
            <text:p>{"id":"3-39","name":"井伊直弼","kana":"いいなおすけ","traitText":null,"ruleText":"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legacyText":"魔力化","imageUrl":"https://one-draw.jp/ijinden/cardlist/003/card/03_039.png","expansion":35,"rarity":1,"type":1,"level":8,"color":8,"term":0,"trait":0,"legacy":1,"orderTable":267,"orderDeck":227},</text:p>
          </table:table-cell>
          <table:table-cell table:number-columns-repeated="16347"/>
        </table:table-row>
        <table:table-row table:style-name="ro2">
          <table:table-cell office:value-type="float" office:value="268" calcext:value-type="float">
            <text:p>268</text:p>
          </table:table-cell>
          <table:table-cell office:value-type="float" office:value="98" calcext:value-type="float">
            <text:p>98</text:p>
          </table:table-cell>
          <table:table-cell office:value-type="string" calcext:value-type="string">
            <text:p>3-40</text:p>
          </table:table-cell>
          <table:table-cell office:value-type="float" office:value="40" calcext:value-type="float">
            <text:p>40</text:p>
          </table:table-cell>
          <table:table-cell office:value-type="string" calcext:value-type="string">
            <text:p>徳川家茂</text:p>
          </table:table-cell>
          <table:table-cell office:value-type="string" calcext:value-type="string">
            <text:p>とくがわいえもち</text:p>
          </table:table-cell>
          <table:table-cell office:value-type="string" calcext:value-type="string">
            <text:p>第３弾ブースターパック</text:p>
          </table:table-cell>
          <table:table-cell table:formula="of:=VLOOKUP([.G269];[$収録番号.$A$1:$収録番号.$B$9];2;0)" office:value-type="float" office:value="35" calcext:value-type="float">
            <text:p>35</text:p>
          </table:table-cell>
          <table:table-cell office:value-type="string" calcext:value-type="string">
            <text:p>N</text:p>
          </table:table-cell>
          <table:table-cell table:formula="of:=VLOOKUP([.I269];[$レアリティ番号.$A$1:$レアリティ番号.$B$4];2;0)" office:value-type="float" office:value="1" calcext:value-type="float">
            <text:p>1</text:p>
          </table:table-cell>
          <table:table-cell office:value-type="string" calcext:value-type="string">
            <text:p>イジン</text:p>
          </table:table-cell>
          <table:table-cell table:formula="of:=VLOOKUP([.K269];[$種類番号.$A$1:$種類番号.$B$4];2;0)" office:value-type="float" office:value="1" calcext:value-type="float">
            <text:p>1</text:p>
          </table:table-cell>
          <table:table-cell office:value-type="string" calcext:value-type="string">
            <text:p>黄</text:p>
          </table:table-cell>
          <table:table-cell table:formula="of:=VLOOKUP([.M269];[$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69];[$特性番号.$A$1:$特性番号.$B$8];2;0);0)" office:value-type="float" office:value="0" calcext:value-type="float">
            <text:p>0</text:p>
          </table:table-cell>
          <table:table-cell office:value-type="string" calcext:value-type="string">
            <text:p>レベル6以上のイジンが戦場に置かれたときに発動できる。戦場の他のイジンすべてを寝かせて、これを山札の下に戻す。</text:p>
          </table:table-cell>
          <table:table-cell table:style-name="ce8" table:formula="of:=NA()" office:value-type="string" office:string-value="" calcext:value-type="error">
            <text:p>#N/A</text:p>
          </table:table-cell>
          <table:table-cell table:formula="of:=IFERROR(VLOOKUP([.$V269];[$遺業能力番号.$A$1:$遺業能力番号.$B$9];2;0);0)" office:value-type="float" office:value="0" calcext:value-type="float">
            <text:p>0</text:p>
          </table:table-cell>
          <table:table-cell office:value-type="string" calcext:value-type="string">
            <text:p>https://one-draw.jp/ijinden/cardlist/003/card/03_040.png</text:p>
          </table:table-cell>
          <table:table-cell table:formula="of:=CONCATENATE([$JSON.$A$1];[.$C269];[$JSON.$B$1];[.$E269];[$JSON.$C$1];[.$F269];[$JSON.$D$1];IF(ISNA([.$S269]);&quot;null&quot;;&quot;&quot;&quot;&quot;&amp;[.$S269]&amp;&quot;&quot;&quot;&quot;);[$JSON.$E$1];[.$U269];[$JSON.$F$1];IF(ISNA([.$V269]);&quot;null&quot;;&quot;&quot;&quot;&quot;&amp;[.$V269]&amp;&quot;&quot;&quot;&quot;);[$JSON.$G$1];[.$X269];[$JSON.$H$1];[.$H269];[$JSON.$I$1];[.J269];[$JSON.$J$1];[.$L269];[$JSON.$K$1];[.$O269];[$JSON.$L$1];[.$N269];[$JSON.$M$1];[.$R269];[$JSON.$N$1];[.$T269];[$JSON.$O$1];[.$W269];[$JSON.$P$1];[.$A269];[$JSON.$Q$1];[.$B269];[$JSON.$R$1])" office:value-type="string" office:string-value="{&quot;id&quot;:&quot;3-40&quot;,&quot;name&quot;:&quot;徳川家茂&quot;,&quot;kana&quot;:&quot;とくがわいえもち&quot;,&quot;traitText&quot;:null,&quot;ruleText&quot;:&quot;レベル6以上のイジンが戦場に置かれたときに発動できる。戦場の他のイジンすべてを寝かせて、これを山札の下に戻す。&quot;,&quot;legacyText&quot;:null,&quot;imageUrl&quot;:&quot;https://one-draw.jp/ijinden/cardlist/003/card/03_040.png&quot;,&quot;expansion&quot;:35,&quot;rarity&quot;:1,&quot;type&quot;:1,&quot;level&quot;:3,&quot;color&quot;:8,&quot;term&quot;:0,&quot;trait&quot;:0,&quot;legacy&quot;:0,&quot;orderTable&quot;:268,&quot;orderDeck&quot;:98}," calcext:value-type="string">
            <text:p>{"id":"3-40","name":"徳川家茂","kana":"とくがわいえもち","traitText":null,"ruleText":"レベル6以上のイジンが戦場に置かれたときに発動できる。戦場の他のイジンすべてを寝かせて、これを山札の下に戻す。","legacyText":null,"imageUrl":"https://one-draw.jp/ijinden/cardlist/003/card/03_040.png","expansion":35,"rarity":1,"type":1,"level":3,"color":8,"term":0,"trait":0,"legacy":0,"orderTable":268,"orderDeck":98},</text:p>
          </table:table-cell>
          <table:table-cell table:number-columns-repeated="16347"/>
        </table:table-row>
        <table:table-row table:style-name="ro2">
          <table:table-cell office:value-type="float" office:value="269" calcext:value-type="float">
            <text:p>269</text:p>
          </table:table-cell>
          <table:table-cell office:value-type="float" office:value="216" calcext:value-type="float">
            <text:p>216</text:p>
          </table:table-cell>
          <table:table-cell office:value-type="string" calcext:value-type="string">
            <text:p>3-41</text:p>
          </table:table-cell>
          <table:table-cell office:value-type="float" office:value="41" calcext:value-type="float">
            <text:p>41</text:p>
          </table:table-cell>
          <table:table-cell office:value-type="string" calcext:value-type="string">
            <text:p>松平定信</text:p>
          </table:table-cell>
          <table:table-cell office:value-type="string" calcext:value-type="string">
            <text:p>まつだいらさだのぶ</text:p>
          </table:table-cell>
          <table:table-cell office:value-type="string" calcext:value-type="string">
            <text:p>第３弾ブースターパック</text:p>
          </table:table-cell>
          <table:table-cell table:formula="of:=VLOOKUP([.G270];[$収録番号.$A$1:$収録番号.$B$9];2;0)" office:value-type="float" office:value="35" calcext:value-type="float">
            <text:p>35</text:p>
          </table:table-cell>
          <table:table-cell office:value-type="string" calcext:value-type="string">
            <text:p>N</text:p>
          </table:table-cell>
          <table:table-cell table:formula="of:=VLOOKUP([.I270];[$レアリティ番号.$A$1:$レアリティ番号.$B$4];2;0)" office:value-type="float" office:value="1" calcext:value-type="float">
            <text:p>1</text:p>
          </table:table-cell>
          <table:table-cell office:value-type="string" calcext:value-type="string">
            <text:p>イジン</text:p>
          </table:table-cell>
          <table:table-cell table:formula="of:=VLOOKUP([.K270];[$種類番号.$A$1:$種類番号.$B$4];2;0)" office:value-type="float" office:value="1" calcext:value-type="float">
            <text:p>1</text:p>
          </table:table-cell>
          <table:table-cell office:value-type="string" calcext:value-type="string">
            <text:p>黄</text:p>
          </table:table-cell>
          <table:table-cell table:formula="of:=VLOOKUP([.M270];[$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70];[$特性番号.$A$1:$特性番号.$B$8];2;0);0)" office:value-type="float" office:value="0" calcext:value-type="float">
            <text:p>0</text:p>
          </table:table-cell>
          <table:table-cell office:value-type="string" calcext:value-type="string">
            <text:p>戦場に置かれたとき、相手の戦場の寝ているイジンすべてを山札の下に戻す。¶この能力はターンに1回しか発動しない。カードが山札に戻されたときに発動できる。自分の山札の下から1枚を手札に加える。</text:p>
          </table:table-cell>
          <table:table-cell table:style-name="ce8" office:value-type="string" calcext:value-type="string">
            <text:p>山札の上か下に戻す</text:p>
          </table:table-cell>
          <table:table-cell table:formula="of:=IFERROR(VLOOKUP([.$V270];[$遺業能力番号.$A$1:$遺業能力番号.$B$9];2;0);0)" office:value-type="float" office:value="7" calcext:value-type="float">
            <text:p>7</text:p>
          </table:table-cell>
          <table:table-cell office:value-type="string" calcext:value-type="string">
            <text:p>https://one-draw.jp/ijinden/cardlist/003/card/03_041.png</text:p>
          </table:table-cell>
          <table:table-cell table:formula="of:=CONCATENATE([$JSON.$A$1];[.$C270];[$JSON.$B$1];[.$E270];[$JSON.$C$1];[.$F270];[$JSON.$D$1];IF(ISNA([.$S270]);&quot;null&quot;;&quot;&quot;&quot;&quot;&amp;[.$S270]&amp;&quot;&quot;&quot;&quot;);[$JSON.$E$1];[.$U270];[$JSON.$F$1];IF(ISNA([.$V270]);&quot;null&quot;;&quot;&quot;&quot;&quot;&amp;[.$V270]&amp;&quot;&quot;&quot;&quot;);[$JSON.$G$1];[.$X270];[$JSON.$H$1];[.$H270];[$JSON.$I$1];[.J270];[$JSON.$J$1];[.$L270];[$JSON.$K$1];[.$O270];[$JSON.$L$1];[.$N270];[$JSON.$M$1];[.$R270];[$JSON.$N$1];[.$T270];[$JSON.$O$1];[.$W270];[$JSON.$P$1];[.$A270];[$JSON.$Q$1];[.$B270];[$JSON.$R$1])" office:value-type="string" office:string-value="{&quot;id&quot;:&quot;3-41&quot;,&quot;name&quot;:&quot;松平定信&quot;,&quot;kana&quot;:&quot;まつだいらさだのぶ&quot;,&quot;traitText&quot;:null,&quot;ruleText&quot;:&quot;戦場に置かれたとき、相手の戦場の寝ているイジンすべてを山札の下に戻す。¶この能力はターンに1回しか発動しない。カードが山札に戻されたときに発動できる。自分の山札の下から1枚を手札に加える。&quot;,&quot;legacyText&quot;:&quot;山札の上か下に戻す&quot;,&quot;imageUrl&quot;:&quot;https://one-draw.jp/ijinden/cardlist/003/card/03_041.png&quot;,&quot;expansion&quot;:35,&quot;rarity&quot;:1,&quot;type&quot;:1,&quot;level&quot;:7,&quot;color&quot;:8,&quot;term&quot;:0,&quot;trait&quot;:0,&quot;legacy&quot;:7,&quot;orderTable&quot;:269,&quot;orderDeck&quot;:216}," calcext:value-type="string">
            <text:p>{"id":"3-41","name":"松平定信","kana":"まつだいらさだのぶ","traitText":null,"ruleText":"戦場に置かれたとき、相手の戦場の寝ているイジンすべてを山札の下に戻す。¶この能力はターンに1回しか発動しない。カードが山札に戻されたときに発動できる。自分の山札の下から1枚を手札に加える。","legacyText":"山札の上か下に戻す","imageUrl":"https://one-draw.jp/ijinden/cardlist/003/card/03_041.png","expansion":35,"rarity":1,"type":1,"level":7,"color":8,"term":0,"trait":0,"legacy":7,"orderTable":269,"orderDeck":216},</text:p>
          </table:table-cell>
          <table:table-cell table:number-columns-repeated="16347"/>
        </table:table-row>
        <table:table-row table:style-name="ro2">
          <table:table-cell office:value-type="float" office:value="270" calcext:value-type="float">
            <text:p>270</text:p>
          </table:table-cell>
          <table:table-cell office:value-type="float" office:value="56" calcext:value-type="float">
            <text:p>56</text:p>
          </table:table-cell>
          <table:table-cell office:value-type="string" calcext:value-type="string">
            <text:p>3-42</text:p>
          </table:table-cell>
          <table:table-cell office:value-type="float" office:value="42" calcext:value-type="float">
            <text:p>42</text:p>
          </table:table-cell>
          <table:table-cell office:value-type="string" calcext:value-type="string">
            <text:p>ルイス・キャロル</text:p>
          </table:table-cell>
          <table:table-cell office:value-type="string" calcext:value-type="string">
            <text:p>るいすきゃろる</text:p>
          </table:table-cell>
          <table:table-cell office:value-type="string" calcext:value-type="string">
            <text:p>第３弾ブースターパック</text:p>
          </table:table-cell>
          <table:table-cell table:formula="of:=VLOOKUP([.G271];[$収録番号.$A$1:$収録番号.$B$9];2;0)" office:value-type="float" office:value="35" calcext:value-type="float">
            <text:p>35</text:p>
          </table:table-cell>
          <table:table-cell office:value-type="string" calcext:value-type="string">
            <text:p>R</text:p>
          </table:table-cell>
          <table:table-cell table:formula="of:=VLOOKUP([.I271];[$レアリティ番号.$A$1:$レアリティ番号.$B$4];2;0)" office:value-type="float" office:value="2" calcext:value-type="float">
            <text:p>2</text:p>
          </table:table-cell>
          <table:table-cell office:value-type="string" calcext:value-type="string">
            <text:p>イジン</text:p>
          </table:table-cell>
          <table:table-cell table:formula="of:=VLOOKUP([.K271];[$種類番号.$A$1:$種類番号.$B$4];2;0)" office:value-type="float" office:value="1" calcext:value-type="float">
            <text:p>1</text:p>
          </table:table-cell>
          <table:table-cell office:value-type="string" calcext:value-type="string">
            <text:p>黄</text:p>
          </table:table-cell>
          <table:table-cell table:formula="of:=VLOOKUP([.M271];[$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7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71];[$特性番号.$A$1:$特性番号.$B$8];2;0);0)" office:value-type="float" office:value="0" calcext:value-type="float">
            <text:p>0</text:p>
          </table:table-cell>
          <table:table-cell office:value-type="string" calcext:value-type="string">
            <text:p>執筆 - この能力は効果を持たない。¶自分はイジン召喚に際し、イジン召喚権でなくマリョク配置権を使ってもよい。¶自分はマリョク配置に際し、マリョク配置権でなくイジン召喚権を使ってもよい。</text:p>
          </table:table-cell>
          <table:table-cell table:style-name="ce8" table:formula="of:=NA()" office:value-type="string" office:string-value="" calcext:value-type="error">
            <text:p>#N/A</text:p>
          </table:table-cell>
          <table:table-cell table:formula="of:=IFERROR(VLOOKUP([.$V271];[$遺業能力番号.$A$1:$遺業能力番号.$B$9];2;0);0)" office:value-type="float" office:value="0" calcext:value-type="float">
            <text:p>0</text:p>
          </table:table-cell>
          <table:table-cell office:value-type="string" calcext:value-type="string">
            <text:p>https://one-draw.jp/ijinden/cardlist/003/card/03_042.png</text:p>
          </table:table-cell>
          <table:table-cell table:formula="of:=CONCATENATE([$JSON.$A$1];[.$C271];[$JSON.$B$1];[.$E271];[$JSON.$C$1];[.$F271];[$JSON.$D$1];IF(ISNA([.$S271]);&quot;null&quot;;&quot;&quot;&quot;&quot;&amp;[.$S271]&amp;&quot;&quot;&quot;&quot;);[$JSON.$E$1];[.$U271];[$JSON.$F$1];IF(ISNA([.$V271]);&quot;null&quot;;&quot;&quot;&quot;&quot;&amp;[.$V271]&amp;&quot;&quot;&quot;&quot;);[$JSON.$G$1];[.$X271];[$JSON.$H$1];[.$H271];[$JSON.$I$1];[.J271];[$JSON.$J$1];[.$L271];[$JSON.$K$1];[.$O271];[$JSON.$L$1];[.$N271];[$JSON.$M$1];[.$R271];[$JSON.$N$1];[.$T271];[$JSON.$O$1];[.$W271];[$JSON.$P$1];[.$A271];[$JSON.$Q$1];[.$B271];[$JSON.$R$1])" office:value-type="string" office:string-value="{&quot;id&quot;:&quot;3-42&quot;,&quot;name&quot;:&quot;ルイス・キャロル&quot;,&quot;kana&quot;:&quot;るいすきゃろる&quot;,&quot;traitText&quot;:null,&quot;ruleText&quot;:&quot;執筆 - この能力は効果を持たない。¶自分はイジン召喚に際し、イジン召喚権でなくマリョク配置権を使ってもよい。¶自分はマリョク配置に際し、マリョク配置権でなくイジン召喚権を使ってもよい。&quot;,&quot;legacyText&quot;:null,&quot;imageUrl&quot;:&quot;https://one-draw.jp/ijinden/cardlist/003/card/03_042.png&quot;,&quot;expansion&quot;:35,&quot;rarity&quot;:2,&quot;type&quot;:1,&quot;level&quot;:2,&quot;color&quot;:8,&quot;term&quot;:2,&quot;trait&quot;:0,&quot;legacy&quot;:0,&quot;orderTable&quot;:270,&quot;orderDeck&quot;:56}," calcext:value-type="string">
            <text:p>{"id":"3-42","name":"ルイス・キャロル","kana":"るいすきゃろる","traitText":null,"ruleText":"執筆 - この能力は効果を持たない。¶自分はイジン召喚に際し、イジン召喚権でなくマリョク配置権を使ってもよい。¶自分はマリョク配置に際し、マリョク配置権でなくイジン召喚権を使ってもよい。","legacyText":null,"imageUrl":"https://one-draw.jp/ijinden/cardlist/003/card/03_042.png","expansion":35,"rarity":2,"type":1,"level":2,"color":8,"term":2,"trait":0,"legacy":0,"orderTable":270,"orderDeck":56},</text:p>
          </table:table-cell>
          <table:table-cell table:number-columns-repeated="16347"/>
        </table:table-row>
        <table:table-row table:style-name="ro2">
          <table:table-cell office:value-type="float" office:value="271" calcext:value-type="float">
            <text:p>271</text:p>
          </table:table-cell>
          <table:table-cell office:value-type="float" office:value="21" calcext:value-type="float">
            <text:p>21</text:p>
          </table:table-cell>
          <table:table-cell office:value-type="string" calcext:value-type="string">
            <text:p>3-43</text:p>
          </table:table-cell>
          <table:table-cell office:value-type="float" office:value="43" calcext:value-type="float">
            <text:p>43</text:p>
          </table:table-cell>
          <table:table-cell office:value-type="string" calcext:value-type="string">
            <text:p>芹沢鴨</text:p>
          </table:table-cell>
          <table:table-cell office:value-type="string" calcext:value-type="string">
            <text:p>せりざわかも</text:p>
          </table:table-cell>
          <table:table-cell office:value-type="string" calcext:value-type="string">
            <text:p>第３弾ブースターパック</text:p>
          </table:table-cell>
          <table:table-cell table:formula="of:=VLOOKUP([.G272];[$収録番号.$A$1:$収録番号.$B$9];2;0)" office:value-type="float" office:value="35" calcext:value-type="float">
            <text:p>35</text:p>
          </table:table-cell>
          <table:table-cell office:value-type="string" calcext:value-type="string">
            <text:p>N</text:p>
          </table:table-cell>
          <table:table-cell table:formula="of:=VLOOKUP([.I272];[$レアリティ番号.$A$1:$レアリティ番号.$B$4];2;0)" office:value-type="float" office:value="1" calcext:value-type="float">
            <text:p>1</text:p>
          </table:table-cell>
          <table:table-cell office:value-type="string" calcext:value-type="string">
            <text:p>イジン</text:p>
          </table:table-cell>
          <table:table-cell table:formula="of:=VLOOKUP([.K272];[$種類番号.$A$1:$種類番号.$B$4];2;0)" office:value-type="float" office:value="1" calcext:value-type="float">
            <text:p>1</text:p>
          </table:table-cell>
          <table:table-cell office:value-type="string" calcext:value-type="string">
            <text:p>紫</text:p>
          </table:table-cell>
          <table:table-cell table:formula="of:=VLOOKUP([.M272];[$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2];[$能力語番号.$A$1:$能力語番号.$B$10];2;0);0)" office:value-type="float" office:value="0" calcext:value-type="float">
            <text:p>0</text:p>
          </table:table-cell>
          <table:table-cell office:value-type="string" calcext:value-type="string">
            <text:p>志願</text:p>
          </table:table-cell>
          <table:table-cell table:formula="of:=IFERROR(VLOOKUP([.$S272];[$特性番号.$A$1:$特性番号.$B$8];2;0);0)" office:value-type="float" office:value="32" calcext:value-type="float">
            <text:p>32</text:p>
          </table:table-cell>
          <table:table-cell office:value-type="string" calcext:value-type="string">
            <text:p>戦場に置かれたとき、相手の手札のカード1つを墓地に置く。そのカードは相手が選ぶ。自分の手札のカード1つを墓地に置く。</text:p>
          </table:table-cell>
          <table:table-cell table:style-name="ce8" office:value-type="string" calcext:value-type="string">
            <text:p>1ドローする</text:p>
          </table:table-cell>
          <table:table-cell table:formula="of:=IFERROR(VLOOKUP([.$V272];[$遺業能力番号.$A$1:$遺業能力番号.$B$9];2;0);0)" office:value-type="float" office:value="4" calcext:value-type="float">
            <text:p>4</text:p>
          </table:table-cell>
          <table:table-cell office:value-type="string" calcext:value-type="string">
            <text:p>https://one-draw.jp/ijinden/cardlist/003/card/03_043.png</text:p>
          </table:table-cell>
          <table:table-cell table:formula="of:=CONCATENATE([$JSON.$A$1];[.$C272];[$JSON.$B$1];[.$E272];[$JSON.$C$1];[.$F272];[$JSON.$D$1];IF(ISNA([.$S272]);&quot;null&quot;;&quot;&quot;&quot;&quot;&amp;[.$S272]&amp;&quot;&quot;&quot;&quot;);[$JSON.$E$1];[.$U272];[$JSON.$F$1];IF(ISNA([.$V272]);&quot;null&quot;;&quot;&quot;&quot;&quot;&amp;[.$V272]&amp;&quot;&quot;&quot;&quot;);[$JSON.$G$1];[.$X272];[$JSON.$H$1];[.$H272];[$JSON.$I$1];[.J272];[$JSON.$J$1];[.$L272];[$JSON.$K$1];[.$O272];[$JSON.$L$1];[.$N272];[$JSON.$M$1];[.$R272];[$JSON.$N$1];[.$T272];[$JSON.$O$1];[.$W272];[$JSON.$P$1];[.$A272];[$JSON.$Q$1];[.$B272];[$JSON.$R$1])" office:value-type="string" office:string-value="{&quot;id&quot;:&quot;3-43&quot;,&quot;name&quot;:&quot;芹沢鴨&quot;,&quot;kana&quot;:&quot;せりざわかも&quot;,&quot;traitText&quot;:&quot;志願&quot;,&quot;ruleText&quot;:&quot;戦場に置かれたとき、相手の手札のカード1つを墓地に置く。そのカードは相手が選ぶ。自分の手札のカード1つを墓地に置く。&quot;,&quot;legacyText&quot;:&quot;1ドローする&quot;,&quot;imageUrl&quot;:&quot;https://one-draw.jp/ijinden/cardlist/003/card/03_043.png&quot;,&quot;expansion&quot;:35,&quot;rarity&quot;:1,&quot;type&quot;:1,&quot;level&quot;:1,&quot;color&quot;:16,&quot;term&quot;:0,&quot;trait&quot;:32,&quot;legacy&quot;:4,&quot;orderTable&quot;:271,&quot;orderDeck&quot;:21}," calcext:value-type="string">
            <text:p>{"id":"3-43","name":"芹沢鴨","kana":"せりざわかも","traitText":"志願","ruleText":"戦場に置かれたとき、相手の手札のカード1つを墓地に置く。そのカードは相手が選ぶ。自分の手札のカード1つを墓地に置く。","legacyText":"1ドローする","imageUrl":"https://one-draw.jp/ijinden/cardlist/003/card/03_043.png","expansion":35,"rarity":1,"type":1,"level":1,"color":16,"term":0,"trait":32,"legacy":4,"orderTable":271,"orderDeck":21},</text:p>
          </table:table-cell>
          <table:table-cell table:number-columns-repeated="16347"/>
        </table:table-row>
        <table:table-row table:style-name="ro2">
          <table:table-cell office:value-type="float" office:value="272" calcext:value-type="float">
            <text:p>272</text:p>
          </table:table-cell>
          <table:table-cell office:value-type="float" office:value="141" calcext:value-type="float">
            <text:p>141</text:p>
          </table:table-cell>
          <table:table-cell office:value-type="string" calcext:value-type="string">
            <text:p>3-44</text:p>
          </table:table-cell>
          <table:table-cell office:value-type="float" office:value="44" calcext:value-type="float">
            <text:p>44</text:p>
          </table:table-cell>
          <table:table-cell office:value-type="string" calcext:value-type="string">
            <text:p>本居宣長</text:p>
          </table:table-cell>
          <table:table-cell office:value-type="string" calcext:value-type="string">
            <text:p>もとおりのりなが</text:p>
          </table:table-cell>
          <table:table-cell office:value-type="string" calcext:value-type="string">
            <text:p>第３弾ブースターパック</text:p>
          </table:table-cell>
          <table:table-cell table:formula="of:=VLOOKUP([.G273];[$収録番号.$A$1:$収録番号.$B$9];2;0)" office:value-type="float" office:value="35" calcext:value-type="float">
            <text:p>35</text:p>
          </table:table-cell>
          <table:table-cell office:value-type="string" calcext:value-type="string">
            <text:p>N</text:p>
          </table:table-cell>
          <table:table-cell table:formula="of:=VLOOKUP([.I273];[$レアリティ番号.$A$1:$レアリティ番号.$B$4];2;0)" office:value-type="float" office:value="1" calcext:value-type="float">
            <text:p>1</text:p>
          </table:table-cell>
          <table:table-cell office:value-type="string" calcext:value-type="string">
            <text:p>イジン</text:p>
          </table:table-cell>
          <table:table-cell table:formula="of:=VLOOKUP([.K273];[$種類番号.$A$1:$種類番号.$B$4];2;0)" office:value-type="float" office:value="1" calcext:value-type="float">
            <text:p>1</text:p>
          </table:table-cell>
          <table:table-cell office:value-type="string" calcext:value-type="string">
            <text:p>紫</text:p>
          </table:table-cell>
          <table:table-cell table:formula="of:=VLOOKUP([.M273];[$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3];[$能力語番号.$A$1:$能力語番号.$B$10];2;0);0)" office:value-type="float" office:value="0" calcext:value-type="float">
            <text:p>0</text:p>
          </table:table-cell>
          <table:table-cell office:value-type="string" calcext:value-type="string">
            <text:p>医術</text:p>
          </table:table-cell>
          <table:table-cell table:formula="of:=IFERROR(VLOOKUP([.$S273];[$特性番号.$A$1:$特性番号.$B$8];2;0);0)" office:value-type="float" office:value="16" calcext:value-type="float">
            <text:p>16</text:p>
          </table:table-cell>
          <table:table-cell office:value-type="string" calcext:value-type="string">
            <text:p>「医術」イジンが自分の戦場に置かれたときに発動できる。1ドローする。相手は1ドローする。</text:p>
          </table:table-cell>
          <table:table-cell table:style-name="ce8" office:value-type="string" calcext:value-type="string">
            <text:p>木霊</text:p>
          </table:table-cell>
          <table:table-cell table:formula="of:=IFERROR(VLOOKUP([.$V273];[$遺業能力番号.$A$1:$遺業能力番号.$B$9];2;0);0)" office:value-type="float" office:value="8" calcext:value-type="float">
            <text:p>8</text:p>
          </table:table-cell>
          <table:table-cell office:value-type="string" calcext:value-type="string">
            <text:p>https://one-draw.jp/ijinden/cardlist/003/card/03_044.png</text:p>
          </table:table-cell>
          <table:table-cell table:formula="of:=CONCATENATE([$JSON.$A$1];[.$C273];[$JSON.$B$1];[.$E273];[$JSON.$C$1];[.$F273];[$JSON.$D$1];IF(ISNA([.$S273]);&quot;null&quot;;&quot;&quot;&quot;&quot;&amp;[.$S273]&amp;&quot;&quot;&quot;&quot;);[$JSON.$E$1];[.$U273];[$JSON.$F$1];IF(ISNA([.$V273]);&quot;null&quot;;&quot;&quot;&quot;&quot;&amp;[.$V273]&amp;&quot;&quot;&quot;&quot;);[$JSON.$G$1];[.$X273];[$JSON.$H$1];[.$H273];[$JSON.$I$1];[.J273];[$JSON.$J$1];[.$L273];[$JSON.$K$1];[.$O273];[$JSON.$L$1];[.$N273];[$JSON.$M$1];[.$R273];[$JSON.$N$1];[.$T273];[$JSON.$O$1];[.$W273];[$JSON.$P$1];[.$A273];[$JSON.$Q$1];[.$B273];[$JSON.$R$1])" office:value-type="string" office:string-value="{&quot;id&quot;:&quot;3-44&quot;,&quot;name&quot;:&quot;本居宣長&quot;,&quot;kana&quot;:&quot;もとおりのりなが&quot;,&quot;traitText&quot;:&quot;医術&quot;,&quot;ruleText&quot;:&quot;「医術」イジンが自分の戦場に置かれたときに発動できる。1ドローする。相手は1ドローする。&quot;,&quot;legacyText&quot;:&quot;木霊&quot;,&quot;imageUrl&quot;:&quot;https://one-draw.jp/ijinden/cardlist/003/card/03_044.png&quot;,&quot;expansion&quot;:35,&quot;rarity&quot;:1,&quot;type&quot;:1,&quot;level&quot;:4,&quot;color&quot;:16,&quot;term&quot;:0,&quot;trait&quot;:16,&quot;legacy&quot;:8,&quot;orderTable&quot;:272,&quot;orderDeck&quot;:141}," calcext:value-type="string">
            <text:p>{"id":"3-44","name":"本居宣長","kana":"もとおりのりなが","traitText":"医術","ruleText":"「医術」イジンが自分の戦場に置かれたときに発動できる。1ドローする。相手は1ドローする。","legacyText":"木霊","imageUrl":"https://one-draw.jp/ijinden/cardlist/003/card/03_044.png","expansion":35,"rarity":1,"type":1,"level":4,"color":16,"term":0,"trait":16,"legacy":8,"orderTable":272,"orderDeck":141},</text:p>
          </table:table-cell>
          <table:table-cell table:number-columns-repeated="16347"/>
        </table:table-row>
        <table:table-row table:style-name="ro2">
          <table:table-cell office:value-type="float" office:value="273" calcext:value-type="float">
            <text:p>273</text:p>
          </table:table-cell>
          <table:table-cell office:value-type="float" office:value="103" calcext:value-type="float">
            <text:p>103</text:p>
          </table:table-cell>
          <table:table-cell office:value-type="string" calcext:value-type="string">
            <text:p>3-45</text:p>
          </table:table-cell>
          <table:table-cell office:value-type="float" office:value="45" calcext:value-type="float">
            <text:p>45</text:p>
          </table:table-cell>
          <table:table-cell office:value-type="string" calcext:value-type="string">
            <text:p>坂本龍馬</text:p>
          </table:table-cell>
          <table:table-cell office:value-type="string" calcext:value-type="string">
            <text:p>さかもとりょうま</text:p>
          </table:table-cell>
          <table:table-cell office:value-type="string" calcext:value-type="string">
            <text:p>第３弾ブースターパック</text:p>
          </table:table-cell>
          <table:table-cell table:formula="of:=VLOOKUP([.G274];[$収録番号.$A$1:$収録番号.$B$9];2;0)" office:value-type="float" office:value="35" calcext:value-type="float">
            <text:p>35</text:p>
          </table:table-cell>
          <table:table-cell office:value-type="string" calcext:value-type="string">
            <text:p>R</text:p>
          </table:table-cell>
          <table:table-cell table:formula="of:=VLOOKUP([.I274];[$レアリティ番号.$A$1:$レアリティ番号.$B$4];2;0)" office:value-type="float" office:value="2" calcext:value-type="float">
            <text:p>2</text:p>
          </table:table-cell>
          <table:table-cell office:value-type="string" calcext:value-type="string">
            <text:p>イジン</text:p>
          </table:table-cell>
          <table:table-cell table:formula="of:=VLOOKUP([.K274];[$種類番号.$A$1:$種類番号.$B$4];2;0)" office:value-type="float" office:value="1" calcext:value-type="float">
            <text:p>1</text:p>
          </table:table-cell>
          <table:table-cell office:value-type="string" calcext:value-type="string">
            <text:p>紫</text:p>
          </table:table-cell>
          <table:table-cell table:formula="of:=VLOOKUP([.M274];[$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74];[$特性番号.$A$1:$特性番号.$B$8];2;0);0)" office:value-type="float" office:value="0" calcext:value-type="float">
            <text:p>0</text:p>
          </table:table-cell>
          <table:table-cell office:value-type="string" calcext:value-type="string">
            <text:p>戦場に置かれたときに発動できる。自分の戦場のガーディアンすべてを手札に戻す。自分の手札のカード1つをガーディアンにして戦場に置いてもよい。</text:p>
          </table:table-cell>
          <table:table-cell table:style-name="ce8" table:formula="of:=NA()" office:value-type="string" office:string-value="" calcext:value-type="error">
            <text:p>#N/A</text:p>
          </table:table-cell>
          <table:table-cell table:formula="of:=IFERROR(VLOOKUP([.$V274];[$遺業能力番号.$A$1:$遺業能力番号.$B$9];2;0);0)" office:value-type="float" office:value="0" calcext:value-type="float">
            <text:p>0</text:p>
          </table:table-cell>
          <table:table-cell office:value-type="string" calcext:value-type="string">
            <text:p>https://one-draw.jp/ijinden/cardlist/003/card/03_045.png</text:p>
          </table:table-cell>
          <table:table-cell table:formula="of:=CONCATENATE([$JSON.$A$1];[.$C274];[$JSON.$B$1];[.$E274];[$JSON.$C$1];[.$F274];[$JSON.$D$1];IF(ISNA([.$S274]);&quot;null&quot;;&quot;&quot;&quot;&quot;&amp;[.$S274]&amp;&quot;&quot;&quot;&quot;);[$JSON.$E$1];[.$U274];[$JSON.$F$1];IF(ISNA([.$V274]);&quot;null&quot;;&quot;&quot;&quot;&quot;&amp;[.$V274]&amp;&quot;&quot;&quot;&quot;);[$JSON.$G$1];[.$X274];[$JSON.$H$1];[.$H274];[$JSON.$I$1];[.J274];[$JSON.$J$1];[.$L274];[$JSON.$K$1];[.$O274];[$JSON.$L$1];[.$N274];[$JSON.$M$1];[.$R274];[$JSON.$N$1];[.$T274];[$JSON.$O$1];[.$W274];[$JSON.$P$1];[.$A274];[$JSON.$Q$1];[.$B274];[$JSON.$R$1])" office:value-type="string" office:string-value="{&quot;id&quot;:&quot;3-45&quot;,&quot;name&quot;:&quot;坂本龍馬&quot;,&quot;kana&quot;:&quot;さかもとりょうま&quot;,&quot;traitText&quot;:null,&quot;ruleText&quot;:&quot;戦場に置かれたときに発動できる。自分の戦場のガーディアンすべてを手札に戻す。自分の手札のカード1つをガーディアンにして戦場に置いてもよい。&quot;,&quot;legacyText&quot;:null,&quot;imageUrl&quot;:&quot;https://one-draw.jp/ijinden/cardlist/003/card/03_045.png&quot;,&quot;expansion&quot;:35,&quot;rarity&quot;:2,&quot;type&quot;:1,&quot;level&quot;:3,&quot;color&quot;:16,&quot;term&quot;:0,&quot;trait&quot;:0,&quot;legacy&quot;:0,&quot;orderTable&quot;:273,&quot;orderDeck&quot;:103}," calcext:value-type="string">
            <text:p>{"id":"3-45","name":"坂本龍馬","kana":"さかもとりょうま","traitText":null,"ruleText":"戦場に置かれたときに発動できる。自分の戦場のガーディアンすべてを手札に戻す。自分の手札のカード1つをガーディアンにして戦場に置いてもよい。","legacyText":null,"imageUrl":"https://one-draw.jp/ijinden/cardlist/003/card/03_045.png","expansion":35,"rarity":2,"type":1,"level":3,"color":16,"term":0,"trait":0,"legacy":0,"orderTable":273,"orderDeck":103},</text:p>
          </table:table-cell>
          <table:table-cell table:number-columns-repeated="16347"/>
        </table:table-row>
        <table:table-row table:style-name="ro2">
          <table:table-cell office:value-type="float" office:value="274" calcext:value-type="float">
            <text:p>274</text:p>
          </table:table-cell>
          <table:table-cell office:value-type="float" office:value="218" calcext:value-type="float">
            <text:p>218</text:p>
          </table:table-cell>
          <table:table-cell office:value-type="string" calcext:value-type="string">
            <text:p>3-46</text:p>
          </table:table-cell>
          <table:table-cell office:value-type="float" office:value="46" calcext:value-type="float">
            <text:p>46</text:p>
          </table:table-cell>
          <table:table-cell office:value-type="string" calcext:value-type="string">
            <text:p>近藤勇</text:p>
          </table:table-cell>
          <table:table-cell office:value-type="string" calcext:value-type="string">
            <text:p>こんどういさみ</text:p>
          </table:table-cell>
          <table:table-cell office:value-type="string" calcext:value-type="string">
            <text:p>第３弾ブースターパック</text:p>
          </table:table-cell>
          <table:table-cell table:formula="of:=VLOOKUP([.G275];[$収録番号.$A$1:$収録番号.$B$9];2;0)" office:value-type="float" office:value="35" calcext:value-type="float">
            <text:p>35</text:p>
          </table:table-cell>
          <table:table-cell office:value-type="string" calcext:value-type="string">
            <text:p>N</text:p>
          </table:table-cell>
          <table:table-cell table:formula="of:=VLOOKUP([.I275];[$レアリティ番号.$A$1:$レアリティ番号.$B$4];2;0)" office:value-type="float" office:value="1" calcext:value-type="float">
            <text:p>1</text:p>
          </table:table-cell>
          <table:table-cell office:value-type="string" calcext:value-type="string">
            <text:p>イジン</text:p>
          </table:table-cell>
          <table:table-cell table:formula="of:=VLOOKUP([.K275];[$種類番号.$A$1:$種類番号.$B$4];2;0)" office:value-type="float" office:value="1" calcext:value-type="float">
            <text:p>1</text:p>
          </table:table-cell>
          <table:table-cell office:value-type="string" calcext:value-type="string">
            <text:p>紫</text:p>
          </table:table-cell>
          <table:table-cell table:formula="of:=VLOOKUP([.M275];[$色番号.$A$1:$色番号.$B$10];2;0)" office:value-type="float" office:value="16" calcext:value-type="float">
            <text:p>16</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5];[$能力語番号.$A$1:$能力語番号.$B$10];2;0);0)" office:value-type="float" office:value="0" calcext:value-type="float">
            <text:p>0</text:p>
          </table:table-cell>
          <table:table-cell office:value-type="string" calcext:value-type="string">
            <text:p>志願</text:p>
          </table:table-cell>
          <table:table-cell table:formula="of:=IFERROR(VLOOKUP([.$S275];[$特性番号.$A$1:$特性番号.$B$8];2;0);0)" office:value-type="float" office:value="32" calcext:value-type="float">
            <text:p>32</text:p>
          </table:table-cell>
          <table:table-cell office:value-type="string" calcext:value-type="string">
            <text:p>戦場に置かれたときに発動できる。自分の戦場のガーディアンすべてを墓地に置く。¶自分の戦場にガーディアンがいない間「即応 ダブルプレッシャー」と「特性：剣術」を得る。</text:p>
          </table:table-cell>
          <table:table-cell table:style-name="ce8" table:formula="of:=NA()" office:value-type="string" office:string-value="" calcext:value-type="error">
            <text:p>#N/A</text:p>
          </table:table-cell>
          <table:table-cell table:formula="of:=IFERROR(VLOOKUP([.$V275];[$遺業能力番号.$A$1:$遺業能力番号.$B$9];2;0);0)" office:value-type="float" office:value="0" calcext:value-type="float">
            <text:p>0</text:p>
          </table:table-cell>
          <table:table-cell office:value-type="string" calcext:value-type="string">
            <text:p>https://one-draw.jp/ijinden/cardlist/003/card/03_046.png</text:p>
          </table:table-cell>
          <table:table-cell table:formula="of:=CONCATENATE([$JSON.$A$1];[.$C275];[$JSON.$B$1];[.$E275];[$JSON.$C$1];[.$F275];[$JSON.$D$1];IF(ISNA([.$S275]);&quot;null&quot;;&quot;&quot;&quot;&quot;&amp;[.$S275]&amp;&quot;&quot;&quot;&quot;);[$JSON.$E$1];[.$U275];[$JSON.$F$1];IF(ISNA([.$V275]);&quot;null&quot;;&quot;&quot;&quot;&quot;&amp;[.$V275]&amp;&quot;&quot;&quot;&quot;);[$JSON.$G$1];[.$X275];[$JSON.$H$1];[.$H275];[$JSON.$I$1];[.J275];[$JSON.$J$1];[.$L275];[$JSON.$K$1];[.$O275];[$JSON.$L$1];[.$N275];[$JSON.$M$1];[.$R275];[$JSON.$N$1];[.$T275];[$JSON.$O$1];[.$W275];[$JSON.$P$1];[.$A275];[$JSON.$Q$1];[.$B275];[$JSON.$R$1])" office:value-type="string" office:string-value="{&quot;id&quot;:&quot;3-46&quot;,&quot;name&quot;:&quot;近藤勇&quot;,&quot;kana&quot;:&quot;こんどういさみ&quot;,&quot;traitText&quot;:&quot;志願&quot;,&quot;ruleText&quot;:&quot;戦場に置かれたときに発動できる。自分の戦場のガーディアンすべてを墓地に置く。¶自分の戦場にガーディアンがいない間「即応 ダブルプレッシャー」と「特性：剣術」を得る。&quot;,&quot;legacyText&quot;:null,&quot;imageUrl&quot;:&quot;https://one-draw.jp/ijinden/cardlist/003/card/03_046.png&quot;,&quot;expansion&quot;:35,&quot;rarity&quot;:1,&quot;type&quot;:1,&quot;level&quot;:7,&quot;color&quot;:16,&quot;term&quot;:0,&quot;trait&quot;:32,&quot;legacy&quot;:0,&quot;orderTable&quot;:274,&quot;orderDeck&quot;:218}," calcext:value-type="string">
            <text:p>{"id":"3-46","name":"近藤勇","kana":"こんどういさみ","traitText":"志願","ruleText":"戦場に置かれたときに発動できる。自分の戦場のガーディアンすべてを墓地に置く。¶自分の戦場にガーディアンがいない間「即応 ダブルプレッシャー」と「特性：剣術」を得る。","legacyText":null,"imageUrl":"https://one-draw.jp/ijinden/cardlist/003/card/03_046.png","expansion":35,"rarity":1,"type":1,"level":7,"color":16,"term":0,"trait":32,"legacy":0,"orderTable":274,"orderDeck":218},</text:p>
          </table:table-cell>
          <table:table-cell table:number-columns-repeated="16347"/>
        </table:table-row>
        <table:table-row table:style-name="ro2">
          <table:table-cell office:value-type="float" office:value="275" calcext:value-type="float">
            <text:p>275</text:p>
          </table:table-cell>
          <table:table-cell office:value-type="float" office:value="22" calcext:value-type="float">
            <text:p>22</text:p>
          </table:table-cell>
          <table:table-cell office:value-type="string" calcext:value-type="string">
            <text:p>3-47</text:p>
          </table:table-cell>
          <table:table-cell office:value-type="float" office:value="47" calcext:value-type="float">
            <text:p>47</text:p>
          </table:table-cell>
          <table:table-cell office:value-type="string" calcext:value-type="string">
            <text:p>徳川慶喜</text:p>
          </table:table-cell>
          <table:table-cell office:value-type="string" calcext:value-type="string">
            <text:p>とくがわよしのぶ</text:p>
          </table:table-cell>
          <table:table-cell office:value-type="string" calcext:value-type="string">
            <text:p>第３弾ブースターパック</text:p>
          </table:table-cell>
          <table:table-cell table:formula="of:=VLOOKUP([.G276];[$収録番号.$A$1:$収録番号.$B$9];2;0)" office:value-type="float" office:value="35" calcext:value-type="float">
            <text:p>35</text:p>
          </table:table-cell>
          <table:table-cell office:value-type="string" calcext:value-type="string">
            <text:p>N</text:p>
          </table:table-cell>
          <table:table-cell table:formula="of:=VLOOKUP([.I276];[$レアリティ番号.$A$1:$レアリティ番号.$B$4];2;0)" office:value-type="float" office:value="1" calcext:value-type="float">
            <text:p>1</text:p>
          </table:table-cell>
          <table:table-cell office:value-type="string" calcext:value-type="string">
            <text:p>イジン</text:p>
          </table:table-cell>
          <table:table-cell table:formula="of:=VLOOKUP([.K276];[$種類番号.$A$1:$種類番号.$B$4];2;0)" office:value-type="float" office:value="1" calcext:value-type="float">
            <text:p>1</text:p>
          </table:table-cell>
          <table:table-cell office:value-type="string" calcext:value-type="string">
            <text:p>紫</text:p>
          </table:table-cell>
          <table:table-cell table:formula="of:=VLOOKUP([.M276];[$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76];[$特性番号.$A$1:$特性番号.$B$8];2;0);0)" office:value-type="float" office:value="0" calcext:value-type="float">
            <text:p>0</text:p>
          </table:table-cell>
          <table:table-cell office:value-type="string" calcext:value-type="string">
            <text:p>戦場の能力によって相手がドローしたとき、相手の手札のカード1つを墓地に置く。そのカードは相手が選ぶ。</text:p>
          </table:table-cell>
          <table:table-cell table:style-name="ce8" table:formula="of:=NA()" office:value-type="string" office:string-value="" calcext:value-type="error">
            <text:p>#N/A</text:p>
          </table:table-cell>
          <table:table-cell table:formula="of:=IFERROR(VLOOKUP([.$V276];[$遺業能力番号.$A$1:$遺業能力番号.$B$9];2;0);0)" office:value-type="float" office:value="0" calcext:value-type="float">
            <text:p>0</text:p>
          </table:table-cell>
          <table:table-cell office:value-type="string" calcext:value-type="string">
            <text:p>https://one-draw.jp/ijinden/cardlist/003/card/03_047.png</text:p>
          </table:table-cell>
          <table:table-cell table:formula="of:=CONCATENATE([$JSON.$A$1];[.$C276];[$JSON.$B$1];[.$E276];[$JSON.$C$1];[.$F276];[$JSON.$D$1];IF(ISNA([.$S276]);&quot;null&quot;;&quot;&quot;&quot;&quot;&amp;[.$S276]&amp;&quot;&quot;&quot;&quot;);[$JSON.$E$1];[.$U276];[$JSON.$F$1];IF(ISNA([.$V276]);&quot;null&quot;;&quot;&quot;&quot;&quot;&amp;[.$V276]&amp;&quot;&quot;&quot;&quot;);[$JSON.$G$1];[.$X276];[$JSON.$H$1];[.$H276];[$JSON.$I$1];[.J276];[$JSON.$J$1];[.$L276];[$JSON.$K$1];[.$O276];[$JSON.$L$1];[.$N276];[$JSON.$M$1];[.$R276];[$JSON.$N$1];[.$T276];[$JSON.$O$1];[.$W276];[$JSON.$P$1];[.$A276];[$JSON.$Q$1];[.$B276];[$JSON.$R$1])" office:value-type="string" office:string-value="{&quot;id&quot;:&quot;3-47&quot;,&quot;name&quot;:&quot;徳川慶喜&quot;,&quot;kana&quot;:&quot;とくがわよしのぶ&quot;,&quot;traitText&quot;:null,&quot;ruleText&quot;:&quot;戦場の能力によって相手がドローしたとき、相手の手札のカード1つを墓地に置く。そのカードは相手が選ぶ。&quot;,&quot;legacyText&quot;:null,&quot;imageUrl&quot;:&quot;https://one-draw.jp/ijinden/cardlist/003/card/03_047.png&quot;,&quot;expansion&quot;:35,&quot;rarity&quot;:1,&quot;type&quot;:1,&quot;level&quot;:1,&quot;color&quot;:16,&quot;term&quot;:0,&quot;trait&quot;:0,&quot;legacy&quot;:0,&quot;orderTable&quot;:275,&quot;orderDeck&quot;:22}," calcext:value-type="string">
            <text:p>{"id":"3-47","name":"徳川慶喜","kana":"とくがわよしのぶ","traitText":null,"ruleText":"戦場の能力によって相手がドローしたとき、相手の手札のカード1つを墓地に置く。そのカードは相手が選ぶ。","legacyText":null,"imageUrl":"https://one-draw.jp/ijinden/cardlist/003/card/03_047.png","expansion":35,"rarity":1,"type":1,"level":1,"color":16,"term":0,"trait":0,"legacy":0,"orderTable":275,"orderDeck":22},</text:p>
          </table:table-cell>
          <table:table-cell table:number-columns-repeated="16347"/>
        </table:table-row>
        <table:table-row table:style-name="ro2">
          <table:table-cell office:value-type="float" office:value="276" calcext:value-type="float">
            <text:p>276</text:p>
          </table:table-cell>
          <table:table-cell office:value-type="float" office:value="142" calcext:value-type="float">
            <text:p>142</text:p>
          </table:table-cell>
          <table:table-cell office:value-type="string" calcext:value-type="string">
            <text:p>3-48</text:p>
          </table:table-cell>
          <table:table-cell office:value-type="float" office:value="48" calcext:value-type="float">
            <text:p>48</text:p>
          </table:table-cell>
          <table:table-cell office:value-type="string" calcext:value-type="string">
            <text:p>マシュー・カルブレイス・ペリー</text:p>
          </table:table-cell>
          <table:table-cell office:value-type="string" calcext:value-type="string">
            <text:p>ましゅーかるぶれいすぺりー</text:p>
          </table:table-cell>
          <table:table-cell office:value-type="string" calcext:value-type="string">
            <text:p>第３弾ブースターパック</text:p>
          </table:table-cell>
          <table:table-cell table:formula="of:=VLOOKUP([.G277];[$収録番号.$A$1:$収録番号.$B$9];2;0)" office:value-type="float" office:value="35" calcext:value-type="float">
            <text:p>35</text:p>
          </table:table-cell>
          <table:table-cell office:value-type="string" calcext:value-type="string">
            <text:p>R</text:p>
          </table:table-cell>
          <table:table-cell table:formula="of:=VLOOKUP([.I277];[$レアリティ番号.$A$1:$レアリティ番号.$B$4];2;0)" office:value-type="float" office:value="2" calcext:value-type="float">
            <text:p>2</text:p>
          </table:table-cell>
          <table:table-cell office:value-type="string" calcext:value-type="string">
            <text:p>イジン</text:p>
          </table:table-cell>
          <table:table-cell table:formula="of:=VLOOKUP([.K277];[$種類番号.$A$1:$種類番号.$B$4];2;0)" office:value-type="float" office:value="1" calcext:value-type="float">
            <text:p>1</text:p>
          </table:table-cell>
          <table:table-cell office:value-type="string" calcext:value-type="string">
            <text:p>紫</text:p>
          </table:table-cell>
          <table:table-cell table:formula="of:=VLOOKUP([.M277];[$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航海</text:p>
          </table:table-cell>
          <table:table-cell table:formula="of:=IFERROR(VLOOKUP([.$Q277];[$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277];[$特性番号.$A$1:$特性番号.$B$8];2;0);0)" office:value-type="float" office:value="0" calcext:value-type="float">
            <text:p>0</text:p>
          </table:table-cell>
          <table:table-cell office:value-type="string" calcext:value-type="string">
            <text:p>手札から墓地に置かれたとき、これを戦場に置く。¶航海 - アタッカーになったとき、戦場か魔力ゾーンの裏のカード1つか2つを指定して発動できる。それらのカードの表を見る。</text:p>
          </table:table-cell>
          <table:table-cell table:style-name="ce8" table:formula="of:=NA()" office:value-type="string" office:string-value="" calcext:value-type="error">
            <text:p>#N/A</text:p>
          </table:table-cell>
          <table:table-cell table:formula="of:=IFERROR(VLOOKUP([.$V277];[$遺業能力番号.$A$1:$遺業能力番号.$B$9];2;0);0)" office:value-type="float" office:value="0" calcext:value-type="float">
            <text:p>0</text:p>
          </table:table-cell>
          <table:table-cell office:value-type="string" calcext:value-type="string">
            <text:p>https://one-draw.jp/ijinden/cardlist/003/card/03_048.png</text:p>
          </table:table-cell>
          <table:table-cell table:formula="of:=CONCATENATE([$JSON.$A$1];[.$C277];[$JSON.$B$1];[.$E277];[$JSON.$C$1];[.$F277];[$JSON.$D$1];IF(ISNA([.$S277]);&quot;null&quot;;&quot;&quot;&quot;&quot;&amp;[.$S277]&amp;&quot;&quot;&quot;&quot;);[$JSON.$E$1];[.$U277];[$JSON.$F$1];IF(ISNA([.$V277]);&quot;null&quot;;&quot;&quot;&quot;&quot;&amp;[.$V277]&amp;&quot;&quot;&quot;&quot;);[$JSON.$G$1];[.$X277];[$JSON.$H$1];[.$H277];[$JSON.$I$1];[.J277];[$JSON.$J$1];[.$L277];[$JSON.$K$1];[.$O277];[$JSON.$L$1];[.$N277];[$JSON.$M$1];[.$R277];[$JSON.$N$1];[.$T277];[$JSON.$O$1];[.$W277];[$JSON.$P$1];[.$A277];[$JSON.$Q$1];[.$B277];[$JSON.$R$1])" office:value-type="string" office:string-value="{&quot;id&quot;:&quot;3-48&quot;,&quot;name&quot;:&quot;マシュー・カルブレイス・ペリー&quot;,&quot;kana&quot;:&quot;ましゅーかるぶれいすぺりー&quot;,&quot;traitText&quot;:null,&quot;ruleText&quot;:&quot;手札から墓地に置かれたとき、これを戦場に置く。¶航海 - アタッカーになったとき、戦場か魔力ゾーンの裏のカード1つか2つを指定して発動できる。それらのカードの表を見る。&quot;,&quot;legacyText&quot;:null,&quot;imageUrl&quot;:&quot;https://one-draw.jp/ijinden/cardlist/003/card/03_048.png&quot;,&quot;expansion&quot;:35,&quot;rarity&quot;:2,&quot;type&quot;:1,&quot;level&quot;:4,&quot;color&quot;:16,&quot;term&quot;:1,&quot;trait&quot;:0,&quot;legacy&quot;:0,&quot;orderTable&quot;:276,&quot;orderDeck&quot;:142}," calcext:value-type="string">
            <text:p>{"id":"3-48","name":"マシュー・カルブレイス・ペリー","kana":"ましゅーかるぶれいすぺりー","traitText":null,"ruleText":"手札から墓地に置かれたとき、これを戦場に置く。¶航海 - アタッカーになったとき、戦場か魔力ゾーンの裏のカード1つか2つを指定して発動できる。それらのカードの表を見る。","legacyText":null,"imageUrl":"https://one-draw.jp/ijinden/cardlist/003/card/03_048.png","expansion":35,"rarity":2,"type":1,"level":4,"color":16,"term":1,"trait":0,"legacy":0,"orderTable":276,"orderDeck":142},</text:p>
          </table:table-cell>
          <table:table-cell table:number-columns-repeated="16347"/>
        </table:table-row>
        <table:table-row table:style-name="ro2">
          <table:table-cell office:value-type="float" office:value="277" calcext:value-type="float">
            <text:p>277</text:p>
          </table:table-cell>
          <table:table-cell office:value-type="float" office:value="228" calcext:value-type="float">
            <text:p>228</text:p>
          </table:table-cell>
          <table:table-cell office:value-type="string" calcext:value-type="string">
            <text:p>3-49</text:p>
          </table:table-cell>
          <table:table-cell office:value-type="float" office:value="49" calcext:value-type="float">
            <text:p>49</text:p>
          </table:table-cell>
          <table:table-cell office:value-type="string" calcext:value-type="string">
            <text:p>タウンゼント・ハリス</text:p>
          </table:table-cell>
          <table:table-cell office:value-type="string" calcext:value-type="string">
            <text:p>たうんぜんとはりす</text:p>
          </table:table-cell>
          <table:table-cell office:value-type="string" calcext:value-type="string">
            <text:p>第３弾ブースターパック</text:p>
          </table:table-cell>
          <table:table-cell table:formula="of:=VLOOKUP([.G278];[$収録番号.$A$1:$収録番号.$B$9];2;0)" office:value-type="float" office:value="35" calcext:value-type="float">
            <text:p>35</text:p>
          </table:table-cell>
          <table:table-cell office:value-type="string" calcext:value-type="string">
            <text:p>N</text:p>
          </table:table-cell>
          <table:table-cell table:formula="of:=VLOOKUP([.I278];[$レアリティ番号.$A$1:$レアリティ番号.$B$4];2;0)" office:value-type="float" office:value="1" calcext:value-type="float">
            <text:p>1</text:p>
          </table:table-cell>
          <table:table-cell office:value-type="string" calcext:value-type="string">
            <text:p>イジン</text:p>
          </table:table-cell>
          <table:table-cell table:formula="of:=VLOOKUP([.K278];[$種類番号.$A$1:$種類番号.$B$4];2;0)" office:value-type="float" office:value="1" calcext:value-type="float">
            <text:p>1</text:p>
          </table:table-cell>
          <table:table-cell office:value-type="string" calcext:value-type="string">
            <text:p>紫</text:p>
          </table:table-cell>
          <table:table-cell table:formula="of:=VLOOKUP([.M278];[$色番号.$A$1:$色番号.$B$10];2;0)" office:value-type="float" office:value="16" calcext:value-type="float">
            <text:p>16</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航海</text:p>
          </table:table-cell>
          <table:table-cell table:formula="of:=IFERROR(VLOOKUP([.$Q278];[$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278];[$特性番号.$A$1:$特性番号.$B$8];2;0);0)" office:value-type="float" office:value="0" calcext:value-type="float">
            <text:p>0</text:p>
          </table:table-cell>
          <table:table-cell office:value-type="string" calcext:value-type="string">
            <text:p>航海 - 「戦場に置かれたとき」か「アタッカーになったとき」に発動できる。自分の戦場のガーディアン1体を手札に戻す。自分の山札の上から1枚をガーディアンとして戦場に置いてもよい。</text:p>
          </table:table-cell>
          <table:table-cell table:style-name="ce8" table:formula="of:=NA()" office:value-type="string" office:string-value="" calcext:value-type="error">
            <text:p>#N/A</text:p>
          </table:table-cell>
          <table:table-cell table:formula="of:=IFERROR(VLOOKUP([.$V278];[$遺業能力番号.$A$1:$遺業能力番号.$B$9];2;0);0)" office:value-type="float" office:value="0" calcext:value-type="float">
            <text:p>0</text:p>
          </table:table-cell>
          <table:table-cell office:value-type="string" calcext:value-type="string">
            <text:p>https://one-draw.jp/ijinden/cardlist/003/card/03_049.png</text:p>
          </table:table-cell>
          <table:table-cell table:formula="of:=CONCATENATE([$JSON.$A$1];[.$C278];[$JSON.$B$1];[.$E278];[$JSON.$C$1];[.$F278];[$JSON.$D$1];IF(ISNA([.$S278]);&quot;null&quot;;&quot;&quot;&quot;&quot;&amp;[.$S278]&amp;&quot;&quot;&quot;&quot;);[$JSON.$E$1];[.$U278];[$JSON.$F$1];IF(ISNA([.$V278]);&quot;null&quot;;&quot;&quot;&quot;&quot;&amp;[.$V278]&amp;&quot;&quot;&quot;&quot;);[$JSON.$G$1];[.$X278];[$JSON.$H$1];[.$H278];[$JSON.$I$1];[.J278];[$JSON.$J$1];[.$L278];[$JSON.$K$1];[.$O278];[$JSON.$L$1];[.$N278];[$JSON.$M$1];[.$R278];[$JSON.$N$1];[.$T278];[$JSON.$O$1];[.$W278];[$JSON.$P$1];[.$A278];[$JSON.$Q$1];[.$B278];[$JSON.$R$1])" office:value-type="string" office:string-value="{&quot;id&quot;:&quot;3-49&quot;,&quot;name&quot;:&quot;タウンゼント・ハリス&quot;,&quot;kana&quot;:&quot;たうんぜんとはりす&quot;,&quot;traitText&quot;:null,&quot;ruleText&quot;:&quot;航海 - 「戦場に置かれたとき」か「アタッカーになったとき」に発動できる。自分の戦場のガーディアン1体を手札に戻す。自分の山札の上から1枚をガーディアンとして戦場に置いてもよい。&quot;,&quot;legacyText&quot;:null,&quot;imageUrl&quot;:&quot;https://one-draw.jp/ijinden/cardlist/003/card/03_049.png&quot;,&quot;expansion&quot;:35,&quot;rarity&quot;:1,&quot;type&quot;:1,&quot;level&quot;:8,&quot;color&quot;:16,&quot;term&quot;:1,&quot;trait&quot;:0,&quot;legacy&quot;:0,&quot;orderTable&quot;:277,&quot;orderDeck&quot;:228}," calcext:value-type="string">
            <text:p>{"id":"3-49","name":"タウンゼント・ハリス","kana":"たうんぜんとはりす","traitText":null,"ruleText":"航海 - 「戦場に置かれたとき」か「アタッカーになったとき」に発動できる。自分の戦場のガーディアン1体を手札に戻す。自分の山札の上から1枚をガーディアンとして戦場に置いてもよい。","legacyText":null,"imageUrl":"https://one-draw.jp/ijinden/cardlist/003/card/03_049.png","expansion":35,"rarity":1,"type":1,"level":8,"color":16,"term":1,"trait":0,"legacy":0,"orderTable":277,"orderDeck":228},</text:p>
          </table:table-cell>
          <table:table-cell table:number-columns-repeated="16347"/>
        </table:table-row>
        <table:table-row table:style-name="ro2">
          <table:table-cell office:value-type="float" office:value="278" calcext:value-type="float">
            <text:p>278</text:p>
          </table:table-cell>
          <table:table-cell office:value-type="float" office:value="104" calcext:value-type="float">
            <text:p>104</text:p>
          </table:table-cell>
          <table:table-cell office:value-type="string" calcext:value-type="string">
            <text:p>3-50</text:p>
          </table:table-cell>
          <table:table-cell office:value-type="float" office:value="50" calcext:value-type="float">
            <text:p>50</text:p>
          </table:table-cell>
          <table:table-cell office:value-type="string" calcext:value-type="string">
            <text:p>勝海舟</text:p>
          </table:table-cell>
          <table:table-cell office:value-type="string" calcext:value-type="string">
            <text:p>かつかいしゅう</text:p>
          </table:table-cell>
          <table:table-cell office:value-type="string" calcext:value-type="string">
            <text:p>第３弾ブースターパック</text:p>
          </table:table-cell>
          <table:table-cell table:formula="of:=VLOOKUP([.G279];[$収録番号.$A$1:$収録番号.$B$9];2;0)" office:value-type="float" office:value="35" calcext:value-type="float">
            <text:p>35</text:p>
          </table:table-cell>
          <table:table-cell office:value-type="string" calcext:value-type="string">
            <text:p>N</text:p>
          </table:table-cell>
          <table:table-cell table:formula="of:=VLOOKUP([.I279];[$レアリティ番号.$A$1:$レアリティ番号.$B$4];2;0)" office:value-type="float" office:value="1" calcext:value-type="float">
            <text:p>1</text:p>
          </table:table-cell>
          <table:table-cell office:value-type="string" calcext:value-type="string">
            <text:p>イジン</text:p>
          </table:table-cell>
          <table:table-cell table:formula="of:=VLOOKUP([.K279];[$種類番号.$A$1:$種類番号.$B$4];2;0)" office:value-type="float" office:value="1" calcext:value-type="float">
            <text:p>1</text:p>
          </table:table-cell>
          <table:table-cell office:value-type="string" calcext:value-type="string">
            <text:p>紫</text:p>
          </table:table-cell>
          <table:table-cell table:formula="of:=VLOOKUP([.M279];[$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79];[$特性番号.$A$1:$特性番号.$B$8];2;0);0)" office:value-type="float" office:value="0" calcext:value-type="float">
            <text:p>0</text:p>
          </table:table-cell>
          <table:table-cell office:value-type="string" calcext:value-type="string">
            <text:p>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text:p>
          </table:table-cell>
          <table:table-cell table:style-name="ce8" office:value-type="string" calcext:value-type="string">
            <text:p>魔力化</text:p>
          </table:table-cell>
          <table:table-cell table:formula="of:=IFERROR(VLOOKUP([.$V279];[$遺業能力番号.$A$1:$遺業能力番号.$B$9];2;0);0)" office:value-type="float" office:value="1" calcext:value-type="float">
            <text:p>1</text:p>
          </table:table-cell>
          <table:table-cell office:value-type="string" calcext:value-type="string">
            <text:p>https://one-draw.jp/ijinden/cardlist/003/card/03_050.png</text:p>
          </table:table-cell>
          <table:table-cell table:formula="of:=CONCATENATE([$JSON.$A$1];[.$C279];[$JSON.$B$1];[.$E279];[$JSON.$C$1];[.$F279];[$JSON.$D$1];IF(ISNA([.$S279]);&quot;null&quot;;&quot;&quot;&quot;&quot;&amp;[.$S279]&amp;&quot;&quot;&quot;&quot;);[$JSON.$E$1];[.$U279];[$JSON.$F$1];IF(ISNA([.$V279]);&quot;null&quot;;&quot;&quot;&quot;&quot;&amp;[.$V279]&amp;&quot;&quot;&quot;&quot;);[$JSON.$G$1];[.$X279];[$JSON.$H$1];[.$H279];[$JSON.$I$1];[.J279];[$JSON.$J$1];[.$L279];[$JSON.$K$1];[.$O279];[$JSON.$L$1];[.$N279];[$JSON.$M$1];[.$R279];[$JSON.$N$1];[.$T279];[$JSON.$O$1];[.$W279];[$JSON.$P$1];[.$A279];[$JSON.$Q$1];[.$B279];[$JSON.$R$1])" office:value-type="string" office:string-value="{&quot;id&quot;:&quot;3-50&quot;,&quot;name&quot;:&quot;勝海舟&quot;,&quot;kana&quot;:&quot;かつかいしゅう&quot;,&quot;traitText&quot;:null,&quot;ruleText&quot;:&quot;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quot;,&quot;legacyText&quot;:&quot;魔力化&quot;,&quot;imageUrl&quot;:&quot;https://one-draw.jp/ijinden/cardlist/003/card/03_050.png&quot;,&quot;expansion&quot;:35,&quot;rarity&quot;:1,&quot;type&quot;:1,&quot;level&quot;:3,&quot;color&quot;:16,&quot;term&quot;:0,&quot;trait&quot;:0,&quot;legacy&quot;:1,&quot;orderTable&quot;:278,&quot;orderDeck&quot;:104}," calcext:value-type="string">
            <text:p>{"id":"3-50","name":"勝海舟","kana":"かつかいしゅう","traitText":null,"ruleText":"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legacyText":"魔力化","imageUrl":"https://one-draw.jp/ijinden/cardlist/003/card/03_050.png","expansion":35,"rarity":1,"type":1,"level":3,"color":16,"term":0,"trait":0,"legacy":1,"orderTable":278,"orderDeck":104},</text:p>
          </table:table-cell>
          <table:table-cell table:number-columns-repeated="16347"/>
        </table:table-row>
        <table:table-row table:style-name="ro2">
          <table:table-cell office:value-type="float" office:value="279" calcext:value-type="float">
            <text:p>279</text:p>
          </table:table-cell>
          <table:table-cell office:value-type="float" office:value="249" calcext:value-type="float">
            <text:p>249</text:p>
          </table:table-cell>
          <table:table-cell office:value-type="string" calcext:value-type="string">
            <text:p>3-51</text:p>
          </table:table-cell>
          <table:table-cell office:value-type="float" office:value="51" calcext:value-type="float">
            <text:p>51</text:p>
          </table:table-cell>
          <table:table-cell office:value-type="string" calcext:value-type="string">
            <text:p>炎上がる天守閣</text:p>
          </table:table-cell>
          <table:table-cell office:value-type="string" calcext:value-type="string">
            <text:p>ほのおあがるてんしゅかく</text:p>
          </table:table-cell>
          <table:table-cell office:value-type="string" calcext:value-type="string">
            <text:p>第３弾ブースターパック</text:p>
          </table:table-cell>
          <table:table-cell table:formula="of:=VLOOKUP([.G280];[$収録番号.$A$1:$収録番号.$B$9];2;0)" office:value-type="float" office:value="35" calcext:value-type="float">
            <text:p>35</text:p>
          </table:table-cell>
          <table:table-cell office:value-type="string" calcext:value-type="string">
            <text:p>N</text:p>
          </table:table-cell>
          <table:table-cell table:formula="of:=VLOOKUP([.I280];[$レアリティ番号.$A$1:$レアリティ番号.$B$4];2;0)" office:value-type="float" office:value="1" calcext:value-type="float">
            <text:p>1</text:p>
          </table:table-cell>
          <table:table-cell office:value-type="string" calcext:value-type="string">
            <text:p>ハイケイ</text:p>
          </table:table-cell>
          <table:table-cell table:formula="of:=VLOOKUP([.K280];[$種類番号.$A$1:$種類番号.$B$4];2;0)" office:value-type="float" office:value="2" calcext:value-type="float">
            <text:p>2</text:p>
          </table:table-cell>
          <table:table-cell office:value-type="string" calcext:value-type="string">
            <text:p>赤</text:p>
          </table:table-cell>
          <table:table-cell table:formula="of:=VLOOKUP([.M280];[$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0];[$特性番号.$A$1:$特性番号.$B$8];2;0);0)" office:value-type="float" office:value="0" calcext:value-type="float">
            <text:p>0</text:p>
          </table:table-cell>
          <table:table-cell office:value-type="string" calcext:value-type="string">
            <text:p>これが戦場にある間、自分の戦場の『アタック+』能力を持つイジンと、自分の戦場のガーディアンは「戦場の能力によって戦場を離れない」を得る。¶破壊されたとき、3ドローする。</text:p>
          </table:table-cell>
          <table:table-cell table:style-name="ce8" table:formula="of:=NA()" office:value-type="string" office:string-value="" calcext:value-type="error">
            <text:p>#N/A</text:p>
          </table:table-cell>
          <table:table-cell table:formula="of:=IFERROR(VLOOKUP([.$V280];[$遺業能力番号.$A$1:$遺業能力番号.$B$9];2;0);0)" office:value-type="float" office:value="0" calcext:value-type="float">
            <text:p>0</text:p>
          </table:table-cell>
          <table:table-cell office:value-type="string" calcext:value-type="string">
            <text:p>https://one-draw.jp/ijinden/cardlist/003/card/03_051.png</text:p>
          </table:table-cell>
          <table:table-cell table:formula="of:=CONCATENATE([$JSON.$A$1];[.$C280];[$JSON.$B$1];[.$E280];[$JSON.$C$1];[.$F280];[$JSON.$D$1];IF(ISNA([.$S280]);&quot;null&quot;;&quot;&quot;&quot;&quot;&amp;[.$S280]&amp;&quot;&quot;&quot;&quot;);[$JSON.$E$1];[.$U280];[$JSON.$F$1];IF(ISNA([.$V280]);&quot;null&quot;;&quot;&quot;&quot;&quot;&amp;[.$V280]&amp;&quot;&quot;&quot;&quot;);[$JSON.$G$1];[.$X280];[$JSON.$H$1];[.$H280];[$JSON.$I$1];[.J280];[$JSON.$J$1];[.$L280];[$JSON.$K$1];[.$O280];[$JSON.$L$1];[.$N280];[$JSON.$M$1];[.$R280];[$JSON.$N$1];[.$T280];[$JSON.$O$1];[.$W280];[$JSON.$P$1];[.$A280];[$JSON.$Q$1];[.$B280];[$JSON.$R$1])" office:value-type="string" office:string-value="{&quot;id&quot;:&quot;3-51&quot;,&quot;name&quot;:&quot;炎上がる天守閣&quot;,&quot;kana&quot;:&quot;ほのおあがるてんしゅかく&quot;,&quot;traitText&quot;:null,&quot;ruleText&quot;:&quot;これが戦場にある間、自分の戦場の『アタック+』能力を持つイジンと、自分の戦場のガーディアンは「戦場の能力によって戦場を離れない」を得る。¶破壊されたとき、3ドローする。&quot;,&quot;legacyText&quot;:null,&quot;imageUrl&quot;:&quot;https://one-draw.jp/ijinden/cardlist/003/card/03_051.png&quot;,&quot;expansion&quot;:35,&quot;rarity&quot;:1,&quot;type&quot;:2,&quot;level&quot;:3,&quot;color&quot;:1,&quot;term&quot;:0,&quot;trait&quot;:0,&quot;legacy&quot;:0,&quot;orderTable&quot;:279,&quot;orderDeck&quot;:249}," calcext:value-type="string">
            <text:p>{"id":"3-51","name":"炎上がる天守閣","kana":"ほのおあがるてんしゅかく","traitText":null,"ruleText":"これが戦場にある間、自分の戦場の『アタック+』能力を持つイジンと、自分の戦場のガーディアンは「戦場の能力によって戦場を離れない」を得る。¶破壊されたとき、3ドローする。","legacyText":null,"imageUrl":"https://one-draw.jp/ijinden/cardlist/003/card/03_051.png","expansion":35,"rarity":1,"type":2,"level":3,"color":1,"term":0,"trait":0,"legacy":0,"orderTable":279,"orderDeck":249},</text:p>
          </table:table-cell>
          <table:table-cell table:number-columns-repeated="16347"/>
        </table:table-row>
        <table:table-row table:style-name="ro2">
          <table:table-cell office:value-type="float" office:value="280" calcext:value-type="float">
            <text:p>280</text:p>
          </table:table-cell>
          <table:table-cell office:value-type="float" office:value="237" calcext:value-type="float">
            <text:p>237</text:p>
          </table:table-cell>
          <table:table-cell office:value-type="string" calcext:value-type="string">
            <text:p>3-52</text:p>
          </table:table-cell>
          <table:table-cell office:value-type="float" office:value="52" calcext:value-type="float">
            <text:p>52</text:p>
          </table:table-cell>
          <table:table-cell office:value-type="string" calcext:value-type="string">
            <text:p>天下分け目の主戦場</text:p>
          </table:table-cell>
          <table:table-cell office:value-type="string" calcext:value-type="string">
            <text:p>てんかわけめのしゅせんじょう</text:p>
          </table:table-cell>
          <table:table-cell office:value-type="string" calcext:value-type="string">
            <text:p>第３弾ブースターパック</text:p>
          </table:table-cell>
          <table:table-cell table:formula="of:=VLOOKUP([.G281];[$収録番号.$A$1:$収録番号.$B$9];2;0)" office:value-type="float" office:value="35" calcext:value-type="float">
            <text:p>35</text:p>
          </table:table-cell>
          <table:table-cell office:value-type="string" calcext:value-type="string">
            <text:p>N</text:p>
          </table:table-cell>
          <table:table-cell table:formula="of:=VLOOKUP([.I281];[$レアリティ番号.$A$1:$レアリティ番号.$B$4];2;0)" office:value-type="float" office:value="1" calcext:value-type="float">
            <text:p>1</text:p>
          </table:table-cell>
          <table:table-cell office:value-type="string" calcext:value-type="string">
            <text:p>ハイケイ</text:p>
          </table:table-cell>
          <table:table-cell table:formula="of:=VLOOKUP([.K281];[$種類番号.$A$1:$種類番号.$B$4];2;0)" office:value-type="float" office:value="2" calcext:value-type="float">
            <text:p>2</text:p>
          </table:table-cell>
          <table:table-cell office:value-type="string" calcext:value-type="string">
            <text:p>赤</text:p>
          </table:table-cell>
          <table:table-cell table:formula="of:=VLOOKUP([.M281];[$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1];[$特性番号.$A$1:$特性番号.$B$8];2;0);0)" office:value-type="float" office:value="0" calcext:value-type="float">
            <text:p>0</text:p>
          </table:table-cell>
          <table:table-cell office:value-type="string" calcext:value-type="string">
            <text:p>これが戦場にある間、自分の魔力ゾーンのマリョクは「戦場の能力によって魔力ゾーンを離れない」を得る。¶カードが魔力ゾーンに5つ以上ある間、自分の戦場のイジンは「アタック+2000」を得る。</text:p>
          </table:table-cell>
          <table:table-cell table:style-name="ce8" table:formula="of:=NA()" office:value-type="string" office:string-value="" calcext:value-type="error">
            <text:p>#N/A</text:p>
          </table:table-cell>
          <table:table-cell table:formula="of:=IFERROR(VLOOKUP([.$V281];[$遺業能力番号.$A$1:$遺業能力番号.$B$9];2;0);0)" office:value-type="float" office:value="0" calcext:value-type="float">
            <text:p>0</text:p>
          </table:table-cell>
          <table:table-cell office:value-type="string" calcext:value-type="string">
            <text:p>https://one-draw.jp/ijinden/cardlist/003/card/03_052.png</text:p>
          </table:table-cell>
          <table:table-cell table:formula="of:=CONCATENATE([$JSON.$A$1];[.$C281];[$JSON.$B$1];[.$E281];[$JSON.$C$1];[.$F281];[$JSON.$D$1];IF(ISNA([.$S281]);&quot;null&quot;;&quot;&quot;&quot;&quot;&amp;[.$S281]&amp;&quot;&quot;&quot;&quot;);[$JSON.$E$1];[.$U281];[$JSON.$F$1];IF(ISNA([.$V281]);&quot;null&quot;;&quot;&quot;&quot;&quot;&amp;[.$V281]&amp;&quot;&quot;&quot;&quot;);[$JSON.$G$1];[.$X281];[$JSON.$H$1];[.$H281];[$JSON.$I$1];[.J281];[$JSON.$J$1];[.$L281];[$JSON.$K$1];[.$O281];[$JSON.$L$1];[.$N281];[$JSON.$M$1];[.$R281];[$JSON.$N$1];[.$T281];[$JSON.$O$1];[.$W281];[$JSON.$P$1];[.$A281];[$JSON.$Q$1];[.$B281];[$JSON.$R$1])" office:value-type="string" office:string-value="{&quot;id&quot;:&quot;3-52&quot;,&quot;name&quot;:&quot;天下分け目の主戦場&quot;,&quot;kana&quot;:&quot;てんかわけめのしゅせんじょう&quot;,&quot;traitText&quot;:null,&quot;ruleText&quot;:&quot;これが戦場にある間、自分の魔力ゾーンのマリョクは「戦場の能力によって魔力ゾーンを離れない」を得る。¶カードが魔力ゾーンに5つ以上ある間、自分の戦場のイジンは「アタック+2000」を得る。&quot;,&quot;legacyText&quot;:null,&quot;imageUrl&quot;:&quot;https://one-draw.jp/ijinden/cardlist/003/card/03_052.png&quot;,&quot;expansion&quot;:35,&quot;rarity&quot;:1,&quot;type&quot;:2,&quot;level&quot;:1,&quot;color&quot;:1,&quot;term&quot;:0,&quot;trait&quot;:0,&quot;legacy&quot;:0,&quot;orderTable&quot;:280,&quot;orderDeck&quot;:237}," calcext:value-type="string">
            <text:p>{"id":"3-52","name":"天下分け目の主戦場","kana":"てんかわけめのしゅせんじょう","traitText":null,"ruleText":"これが戦場にある間、自分の魔力ゾーンのマリョクは「戦場の能力によって魔力ゾーンを離れない」を得る。¶カードが魔力ゾーンに5つ以上ある間、自分の戦場のイジンは「アタック+2000」を得る。","legacyText":null,"imageUrl":"https://one-draw.jp/ijinden/cardlist/003/card/03_052.png","expansion":35,"rarity":1,"type":2,"level":1,"color":1,"term":0,"trait":0,"legacy":0,"orderTable":280,"orderDeck":237},</text:p>
          </table:table-cell>
          <table:table-cell table:number-columns-repeated="16347"/>
        </table:table-row>
        <table:table-row table:style-name="ro2">
          <table:table-cell office:value-type="float" office:value="281" calcext:value-type="float">
            <text:p>281</text:p>
          </table:table-cell>
          <table:table-cell office:value-type="float" office:value="262" calcext:value-type="float">
            <text:p>262</text:p>
          </table:table-cell>
          <table:table-cell office:value-type="string" calcext:value-type="string">
            <text:p>3-53</text:p>
          </table:table-cell>
          <table:table-cell office:value-type="float" office:value="53" calcext:value-type="float">
            <text:p>53</text:p>
          </table:table-cell>
          <table:table-cell office:value-type="string" calcext:value-type="string">
            <text:p>永遠の帝都</text:p>
          </table:table-cell>
          <table:table-cell office:value-type="string" calcext:value-type="string">
            <text:p>えいえんのていと</text:p>
          </table:table-cell>
          <table:table-cell office:value-type="string" calcext:value-type="string">
            <text:p>第３弾ブースターパック</text:p>
          </table:table-cell>
          <table:table-cell table:formula="of:=VLOOKUP([.G282];[$収録番号.$A$1:$収録番号.$B$9];2;0)" office:value-type="float" office:value="35" calcext:value-type="float">
            <text:p>35</text:p>
          </table:table-cell>
          <table:table-cell office:value-type="string" calcext:value-type="string">
            <text:p>N</text:p>
          </table:table-cell>
          <table:table-cell table:formula="of:=VLOOKUP([.I282];[$レアリティ番号.$A$1:$レアリティ番号.$B$4];2;0)" office:value-type="float" office:value="1" calcext:value-type="float">
            <text:p>1</text:p>
          </table:table-cell>
          <table:table-cell office:value-type="string" calcext:value-type="string">
            <text:p>ハイケイ</text:p>
          </table:table-cell>
          <table:table-cell table:formula="of:=VLOOKUP([.K282];[$種類番号.$A$1:$種類番号.$B$4];2;0)" office:value-type="float" office:value="2" calcext:value-type="float">
            <text:p>2</text:p>
          </table:table-cell>
          <table:table-cell office:value-type="string" calcext:value-type="string">
            <text:p>青</text:p>
          </table:table-cell>
          <table:table-cell table:formula="of:=VLOOKUP([.M282];[$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2];[$特性番号.$A$1:$特性番号.$B$8];2;0);0)" office:value-type="float" office:value="0" calcext:value-type="float">
            <text:p>0</text:p>
          </table:table-cell>
          <table:table-cell office:value-type="string" calcext:value-type="string">
            <text:p>これが戦場にある間、自分の戦場の『ブロック+』能力を持つイジンと、自分の戦場のガーディアンは「能力によって破壊されない」を得る。¶これが戦場にある間、自分の戦場のレベル3以下のイジンは「ブロック+1000」を得る。</text:p>
          </table:table-cell>
          <table:table-cell table:style-name="ce8" table:formula="of:=NA()" office:value-type="string" office:string-value="" calcext:value-type="error">
            <text:p>#N/A</text:p>
          </table:table-cell>
          <table:table-cell table:formula="of:=IFERROR(VLOOKUP([.$V282];[$遺業能力番号.$A$1:$遺業能力番号.$B$9];2;0);0)" office:value-type="float" office:value="0" calcext:value-type="float">
            <text:p>0</text:p>
          </table:table-cell>
          <table:table-cell office:value-type="string" calcext:value-type="string">
            <text:p>https://one-draw.jp/ijinden/cardlist/003/card/03_053.png</text:p>
          </table:table-cell>
          <table:table-cell table:formula="of:=CONCATENATE([$JSON.$A$1];[.$C282];[$JSON.$B$1];[.$E282];[$JSON.$C$1];[.$F282];[$JSON.$D$1];IF(ISNA([.$S282]);&quot;null&quot;;&quot;&quot;&quot;&quot;&amp;[.$S282]&amp;&quot;&quot;&quot;&quot;);[$JSON.$E$1];[.$U282];[$JSON.$F$1];IF(ISNA([.$V282]);&quot;null&quot;;&quot;&quot;&quot;&quot;&amp;[.$V282]&amp;&quot;&quot;&quot;&quot;);[$JSON.$G$1];[.$X282];[$JSON.$H$1];[.$H282];[$JSON.$I$1];[.J282];[$JSON.$J$1];[.$L282];[$JSON.$K$1];[.$O282];[$JSON.$L$1];[.$N282];[$JSON.$M$1];[.$R282];[$JSON.$N$1];[.$T282];[$JSON.$O$1];[.$W282];[$JSON.$P$1];[.$A282];[$JSON.$Q$1];[.$B282];[$JSON.$R$1])" office:value-type="string" office:string-value="{&quot;id&quot;:&quot;3-53&quot;,&quot;name&quot;:&quot;永遠の帝都&quot;,&quot;kana&quot;:&quot;えいえんのていと&quot;,&quot;traitText&quot;:null,&quot;ruleText&quot;:&quot;これが戦場にある間、自分の戦場の『ブロック+』能力を持つイジンと、自分の戦場のガーディアンは「能力によって破壊されない」を得る。¶これが戦場にある間、自分の戦場のレベル3以下のイジンは「ブロック+1000」を得る。&quot;,&quot;legacyText&quot;:null,&quot;imageUrl&quot;:&quot;https://one-draw.jp/ijinden/cardlist/003/card/03_053.png&quot;,&quot;expansion&quot;:35,&quot;rarity&quot;:1,&quot;type&quot;:2,&quot;level&quot;:4,&quot;color&quot;:2,&quot;term&quot;:0,&quot;trait&quot;:0,&quot;legacy&quot;:0,&quot;orderTable&quot;:281,&quot;orderDeck&quot;:262}," calcext:value-type="string">
            <text:p>{"id":"3-53","name":"永遠の帝都","kana":"えいえんのていと","traitText":null,"ruleText":"これが戦場にある間、自分の戦場の『ブロック+』能力を持つイジンと、自分の戦場のガーディアンは「能力によって破壊されない」を得る。¶これが戦場にある間、自分の戦場のレベル3以下のイジンは「ブロック+1000」を得る。","legacyText":null,"imageUrl":"https://one-draw.jp/ijinden/cardlist/003/card/03_053.png","expansion":35,"rarity":1,"type":2,"level":4,"color":2,"term":0,"trait":0,"legacy":0,"orderTable":281,"orderDeck":262},</text:p>
          </table:table-cell>
          <table:table-cell table:number-columns-repeated="16347"/>
        </table:table-row>
        <table:table-row table:style-name="ro2">
          <table:table-cell office:value-type="float" office:value="282" calcext:value-type="float">
            <text:p>282</text:p>
          </table:table-cell>
          <table:table-cell office:value-type="float" office:value="268" calcext:value-type="float">
            <text:p>268</text:p>
          </table:table-cell>
          <table:table-cell office:value-type="string" calcext:value-type="string">
            <text:p>3-54</text:p>
          </table:table-cell>
          <table:table-cell office:value-type="float" office:value="54" calcext:value-type="float">
            <text:p>54</text:p>
          </table:table-cell>
          <table:table-cell office:value-type="string" calcext:value-type="string">
            <text:p>暴風岬</text:p>
          </table:table-cell>
          <table:table-cell office:value-type="string" calcext:value-type="string">
            <text:p>ぼうふうみさき</text:p>
          </table:table-cell>
          <table:table-cell office:value-type="string" calcext:value-type="string">
            <text:p>第３弾ブースターパック</text:p>
          </table:table-cell>
          <table:table-cell table:formula="of:=VLOOKUP([.G283];[$収録番号.$A$1:$収録番号.$B$9];2;0)" office:value-type="float" office:value="35" calcext:value-type="float">
            <text:p>35</text:p>
          </table:table-cell>
          <table:table-cell office:value-type="string" calcext:value-type="string">
            <text:p>N</text:p>
          </table:table-cell>
          <table:table-cell table:formula="of:=VLOOKUP([.I283];[$レアリティ番号.$A$1:$レアリティ番号.$B$4];2;0)" office:value-type="float" office:value="1" calcext:value-type="float">
            <text:p>1</text:p>
          </table:table-cell>
          <table:table-cell office:value-type="string" calcext:value-type="string">
            <text:p>ハイケイ</text:p>
          </table:table-cell>
          <table:table-cell table:formula="of:=VLOOKUP([.K283];[$種類番号.$A$1:$種類番号.$B$4];2;0)" office:value-type="float" office:value="2" calcext:value-type="float">
            <text:p>2</text:p>
          </table:table-cell>
          <table:table-cell office:value-type="string" calcext:value-type="string">
            <text:p>青</text:p>
          </table:table-cell>
          <table:table-cell table:formula="of:=VLOOKUP([.M283];[$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3];[$特性番号.$A$1:$特性番号.$B$8];2;0);0)" office:value-type="float" office:value="0" calcext:value-type="float">
            <text:p>0</text:p>
          </table:table-cell>
          <table:table-cell office:value-type="string" calcext:value-type="string">
            <text:p>自分のエンドフェイズが開始したとき、自分の戦場のイジン1体を手札に戻して発動できる。1ドローする。</text:p>
          </table:table-cell>
          <table:table-cell table:style-name="ce8" office:value-type="string" calcext:value-type="string">
            <text:p>手札に戻す</text:p>
          </table:table-cell>
          <table:table-cell table:formula="of:=IFERROR(VLOOKUP([.$V283];[$遺業能力番号.$A$1:$遺業能力番号.$B$9];2;0);0)" office:value-type="float" office:value="5" calcext:value-type="float">
            <text:p>5</text:p>
          </table:table-cell>
          <table:table-cell office:value-type="string" calcext:value-type="string">
            <text:p>https://one-draw.jp/ijinden/cardlist/003/card/03_054.png</text:p>
          </table:table-cell>
          <table:table-cell table:formula="of:=CONCATENATE([$JSON.$A$1];[.$C283];[$JSON.$B$1];[.$E283];[$JSON.$C$1];[.$F283];[$JSON.$D$1];IF(ISNA([.$S283]);&quot;null&quot;;&quot;&quot;&quot;&quot;&amp;[.$S283]&amp;&quot;&quot;&quot;&quot;);[$JSON.$E$1];[.$U283];[$JSON.$F$1];IF(ISNA([.$V283]);&quot;null&quot;;&quot;&quot;&quot;&quot;&amp;[.$V283]&amp;&quot;&quot;&quot;&quot;);[$JSON.$G$1];[.$X283];[$JSON.$H$1];[.$H283];[$JSON.$I$1];[.J283];[$JSON.$J$1];[.$L283];[$JSON.$K$1];[.$O283];[$JSON.$L$1];[.$N283];[$JSON.$M$1];[.$R283];[$JSON.$N$1];[.$T283];[$JSON.$O$1];[.$W283];[$JSON.$P$1];[.$A283];[$JSON.$Q$1];[.$B283];[$JSON.$R$1])" office:value-type="string" office:string-value="{&quot;id&quot;:&quot;3-54&quot;,&quot;name&quot;:&quot;暴風岬&quot;,&quot;kana&quot;:&quot;ぼうふうみさき&quot;,&quot;traitText&quot;:null,&quot;ruleText&quot;:&quot;自分のエンドフェイズが開始したとき、自分の戦場のイジン1体を手札に戻して発動できる。1ドローする。&quot;,&quot;legacyText&quot;:&quot;手札に戻す&quot;,&quot;imageUrl&quot;:&quot;https://one-draw.jp/ijinden/cardlist/003/card/03_054.png&quot;,&quot;expansion&quot;:35,&quot;rarity&quot;:1,&quot;type&quot;:2,&quot;level&quot;:5,&quot;color&quot;:2,&quot;term&quot;:0,&quot;trait&quot;:0,&quot;legacy&quot;:5,&quot;orderTable&quot;:282,&quot;orderDeck&quot;:268}," calcext:value-type="string">
            <text:p>{"id":"3-54","name":"暴風岬","kana":"ぼうふうみさき","traitText":null,"ruleText":"自分のエンドフェイズが開始したとき、自分の戦場のイジン1体を手札に戻して発動できる。1ドローする。","legacyText":"手札に戻す","imageUrl":"https://one-draw.jp/ijinden/cardlist/003/card/03_054.png","expansion":35,"rarity":1,"type":2,"level":5,"color":2,"term":0,"trait":0,"legacy":5,"orderTable":282,"orderDeck":268},</text:p>
          </table:table-cell>
          <table:table-cell table:number-columns-repeated="16347"/>
        </table:table-row>
        <table:table-row table:style-name="ro2">
          <table:table-cell office:value-type="float" office:value="283" calcext:value-type="float">
            <text:p>283</text:p>
          </table:table-cell>
          <table:table-cell office:value-type="float" office:value="253" calcext:value-type="float">
            <text:p>253</text:p>
          </table:table-cell>
          <table:table-cell office:value-type="string" calcext:value-type="string">
            <text:p>3-55</text:p>
          </table:table-cell>
          <table:table-cell office:value-type="float" office:value="55" calcext:value-type="float">
            <text:p>55</text:p>
          </table:table-cell>
          <table:table-cell office:value-type="string" calcext:value-type="string">
            <text:p>商館並ぶ人工島</text:p>
          </table:table-cell>
          <table:table-cell office:value-type="string" calcext:value-type="string">
            <text:p>しょうかんならぶじんこうとう</text:p>
          </table:table-cell>
          <table:table-cell office:value-type="string" calcext:value-type="string">
            <text:p>第３弾ブースターパック</text:p>
          </table:table-cell>
          <table:table-cell table:formula="of:=VLOOKUP([.G284];[$収録番号.$A$1:$収録番号.$B$9];2;0)" office:value-type="float" office:value="35" calcext:value-type="float">
            <text:p>35</text:p>
          </table:table-cell>
          <table:table-cell office:value-type="string" calcext:value-type="string">
            <text:p>N</text:p>
          </table:table-cell>
          <table:table-cell table:formula="of:=VLOOKUP([.I284];[$レアリティ番号.$A$1:$レアリティ番号.$B$4];2;0)" office:value-type="float" office:value="1" calcext:value-type="float">
            <text:p>1</text:p>
          </table:table-cell>
          <table:table-cell office:value-type="string" calcext:value-type="string">
            <text:p>ハイケイ</text:p>
          </table:table-cell>
          <table:table-cell table:formula="of:=VLOOKUP([.K284];[$種類番号.$A$1:$種類番号.$B$4];2;0)" office:value-type="float" office:value="2" calcext:value-type="float">
            <text:p>2</text:p>
          </table:table-cell>
          <table:table-cell office:value-type="string" calcext:value-type="string">
            <text:p>緑</text:p>
          </table:table-cell>
          <table:table-cell table:formula="of:=VLOOKUP([.M284];[$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4];[$特性番号.$A$1:$特性番号.$B$8];2;0);0)" office:value-type="float" office:value="0" calcext:value-type="float">
            <text:p>0</text:p>
          </table:table-cell>
          <table:table-cell office:value-type="string" calcext:value-type="string">
            <text:p>メインフェイズが開始したとき、戦場の緑のイジン1体か、戦場の「航海」を持つイジン1体を寝かせて発動できる。そのイジンのプレイヤーは1ドローする。</text:p>
          </table:table-cell>
          <table:table-cell table:style-name="ce8" table:formula="of:=NA()" office:value-type="string" office:string-value="" calcext:value-type="error">
            <text:p>#N/A</text:p>
          </table:table-cell>
          <table:table-cell table:formula="of:=IFERROR(VLOOKUP([.$V284];[$遺業能力番号.$A$1:$遺業能力番号.$B$9];2;0);0)" office:value-type="float" office:value="0" calcext:value-type="float">
            <text:p>0</text:p>
          </table:table-cell>
          <table:table-cell office:value-type="string" calcext:value-type="string">
            <text:p>https://one-draw.jp/ijinden/cardlist/003/card/03_055.png</text:p>
          </table:table-cell>
          <table:table-cell table:formula="of:=CONCATENATE([$JSON.$A$1];[.$C284];[$JSON.$B$1];[.$E284];[$JSON.$C$1];[.$F284];[$JSON.$D$1];IF(ISNA([.$S284]);&quot;null&quot;;&quot;&quot;&quot;&quot;&amp;[.$S284]&amp;&quot;&quot;&quot;&quot;);[$JSON.$E$1];[.$U284];[$JSON.$F$1];IF(ISNA([.$V284]);&quot;null&quot;;&quot;&quot;&quot;&quot;&amp;[.$V284]&amp;&quot;&quot;&quot;&quot;);[$JSON.$G$1];[.$X284];[$JSON.$H$1];[.$H284];[$JSON.$I$1];[.J284];[$JSON.$J$1];[.$L284];[$JSON.$K$1];[.$O284];[$JSON.$L$1];[.$N284];[$JSON.$M$1];[.$R284];[$JSON.$N$1];[.$T284];[$JSON.$O$1];[.$W284];[$JSON.$P$1];[.$A284];[$JSON.$Q$1];[.$B284];[$JSON.$R$1])" office:value-type="string" office:string-value="{&quot;id&quot;:&quot;3-55&quot;,&quot;name&quot;:&quot;商館並ぶ人工島&quot;,&quot;kana&quot;:&quot;しょうかんならぶじんこうとう&quot;,&quot;traitText&quot;:null,&quot;ruleText&quot;:&quot;メインフェイズが開始したとき、戦場の緑のイジン1体か、戦場の「航海」を持つイジン1体を寝かせて発動できる。そのイジンのプレイヤーは1ドローする。&quot;,&quot;legacyText&quot;:null,&quot;imageUrl&quot;:&quot;https://one-draw.jp/ijinden/cardlist/003/card/03_055.png&quot;,&quot;expansion&quot;:35,&quot;rarity&quot;:1,&quot;type&quot;:2,&quot;level&quot;:3,&quot;color&quot;:4,&quot;term&quot;:0,&quot;trait&quot;:0,&quot;legacy&quot;:0,&quot;orderTable&quot;:283,&quot;orderDeck&quot;:253}," calcext:value-type="string">
            <text:p>{"id":"3-55","name":"商館並ぶ人工島","kana":"しょうかんならぶじんこうとう","traitText":null,"ruleText":"メインフェイズが開始したとき、戦場の緑のイジン1体か、戦場の「航海」を持つイジン1体を寝かせて発動できる。そのイジンのプレイヤーは1ドローする。","legacyText":null,"imageUrl":"https://one-draw.jp/ijinden/cardlist/003/card/03_055.png","expansion":35,"rarity":1,"type":2,"level":3,"color":4,"term":0,"trait":0,"legacy":0,"orderTable":283,"orderDeck":253},</text:p>
          </table:table-cell>
          <table:table-cell table:number-columns-repeated="16347"/>
        </table:table-row>
        <table:table-row table:style-name="ro2">
          <table:table-cell office:value-type="float" office:value="284" calcext:value-type="float">
            <text:p>284</text:p>
          </table:table-cell>
          <table:table-cell office:value-type="float" office:value="270" calcext:value-type="float">
            <text:p>270</text:p>
          </table:table-cell>
          <table:table-cell office:value-type="string" calcext:value-type="string">
            <text:p>3-56</text:p>
          </table:table-cell>
          <table:table-cell office:value-type="float" office:value="56" calcext:value-type="float">
            <text:p>56</text:p>
          </table:table-cell>
          <table:table-cell office:value-type="string" calcext:value-type="string">
            <text:p>志士の藩校</text:p>
          </table:table-cell>
          <table:table-cell office:value-type="string" calcext:value-type="string">
            <text:p>ししのはんこう</text:p>
          </table:table-cell>
          <table:table-cell office:value-type="string" calcext:value-type="string">
            <text:p>第３弾ブースターパック</text:p>
          </table:table-cell>
          <table:table-cell table:formula="of:=VLOOKUP([.G285];[$収録番号.$A$1:$収録番号.$B$9];2;0)" office:value-type="float" office:value="35" calcext:value-type="float">
            <text:p>35</text:p>
          </table:table-cell>
          <table:table-cell office:value-type="string" calcext:value-type="string">
            <text:p>N</text:p>
          </table:table-cell>
          <table:table-cell table:formula="of:=VLOOKUP([.I285];[$レアリティ番号.$A$1:$レアリティ番号.$B$4];2;0)" office:value-type="float" office:value="1" calcext:value-type="float">
            <text:p>1</text:p>
          </table:table-cell>
          <table:table-cell office:value-type="string" calcext:value-type="string">
            <text:p>ハイケイ</text:p>
          </table:table-cell>
          <table:table-cell table:formula="of:=VLOOKUP([.K285];[$種類番号.$A$1:$種類番号.$B$4];2;0)" office:value-type="float" office:value="2" calcext:value-type="float">
            <text:p>2</text:p>
          </table:table-cell>
          <table:table-cell office:value-type="string" calcext:value-type="string">
            <text:p>緑</text:p>
          </table:table-cell>
          <table:table-cell table:formula="of:=VLOOKUP([.M285];[$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85];[$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85];[$特性番号.$A$1:$特性番号.$B$8];2;0);0)" office:value-type="float" office:value="0" calcext:value-type="float">
            <text:p>0</text:p>
          </table:table-cell>
          <table:table-cell office:value-type="string" calcext:value-type="string">
            <text:p>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text:p>
          </table:table-cell>
          <table:table-cell table:style-name="ce8" office:value-type="string" calcext:value-type="string">
            <text:p>木霊</text:p>
          </table:table-cell>
          <table:table-cell table:formula="of:=IFERROR(VLOOKUP([.$V285];[$遺業能力番号.$A$1:$遺業能力番号.$B$9];2;0);0)" office:value-type="float" office:value="8" calcext:value-type="float">
            <text:p>8</text:p>
          </table:table-cell>
          <table:table-cell office:value-type="string" calcext:value-type="string">
            <text:p>https://one-draw.jp/ijinden/cardlist/003/card/03_056.png</text:p>
          </table:table-cell>
          <table:table-cell table:formula="of:=CONCATENATE([$JSON.$A$1];[.$C285];[$JSON.$B$1];[.$E285];[$JSON.$C$1];[.$F285];[$JSON.$D$1];IF(ISNA([.$S285]);&quot;null&quot;;&quot;&quot;&quot;&quot;&amp;[.$S285]&amp;&quot;&quot;&quot;&quot;);[$JSON.$E$1];[.$U285];[$JSON.$F$1];IF(ISNA([.$V285]);&quot;null&quot;;&quot;&quot;&quot;&quot;&amp;[.$V285]&amp;&quot;&quot;&quot;&quot;);[$JSON.$G$1];[.$X285];[$JSON.$H$1];[.$H285];[$JSON.$I$1];[.J285];[$JSON.$J$1];[.$L285];[$JSON.$K$1];[.$O285];[$JSON.$L$1];[.$N285];[$JSON.$M$1];[.$R285];[$JSON.$N$1];[.$T285];[$JSON.$O$1];[.$W285];[$JSON.$P$1];[.$A285];[$JSON.$Q$1];[.$B285];[$JSON.$R$1])" office:value-type="string" office:string-value="{&quot;id&quot;:&quot;3-56&quot;,&quot;name&quot;:&quot;志士の藩校&quot;,&quot;kana&quot;:&quot;ししのはんこう&quot;,&quot;traitText&quot;:null,&quot;ruleText&quot;:&quot;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quot;,&quot;legacyText&quot;:&quot;木霊&quot;,&quot;imageUrl&quot;:&quot;https://one-draw.jp/ijinden/cardlist/003/card/03_056.png&quot;,&quot;expansion&quot;:35,&quot;rarity&quot;:1,&quot;type&quot;:2,&quot;level&quot;:5,&quot;color&quot;:4,&quot;term&quot;:2,&quot;trait&quot;:0,&quot;legacy&quot;:8,&quot;orderTable&quot;:284,&quot;orderDeck&quot;:270}," calcext:value-type="string">
            <text:p>{"id":"3-56","name":"志士の藩校","kana":"ししのはんこう","traitText":null,"ruleText":"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legacyText":"木霊","imageUrl":"https://one-draw.jp/ijinden/cardlist/003/card/03_056.png","expansion":35,"rarity":1,"type":2,"level":5,"color":4,"term":2,"trait":0,"legacy":8,"orderTable":284,"orderDeck":270},</text:p>
          </table:table-cell>
          <table:table-cell table:number-columns-repeated="16347"/>
        </table:table-row>
        <table:table-row table:style-name="ro2">
          <table:table-cell office:value-type="float" office:value="285" calcext:value-type="float">
            <text:p>285</text:p>
          </table:table-cell>
          <table:table-cell office:value-type="float" office:value="264" calcext:value-type="float">
            <text:p>264</text:p>
          </table:table-cell>
          <table:table-cell office:value-type="string" calcext:value-type="string">
            <text:p>3-57</text:p>
          </table:table-cell>
          <table:table-cell office:value-type="float" office:value="57" calcext:value-type="float">
            <text:p>57</text:p>
          </table:table-cell>
          <table:table-cell office:value-type="string" calcext:value-type="string">
            <text:p>風神雷神図</text:p>
          </table:table-cell>
          <table:table-cell office:value-type="string" calcext:value-type="string">
            <text:p>ふうじんらいじんず</text:p>
          </table:table-cell>
          <table:table-cell office:value-type="string" calcext:value-type="string">
            <text:p>第３弾ブースターパック</text:p>
          </table:table-cell>
          <table:table-cell table:formula="of:=VLOOKUP([.G286];[$収録番号.$A$1:$収録番号.$B$9];2;0)" office:value-type="float" office:value="35" calcext:value-type="float">
            <text:p>35</text:p>
          </table:table-cell>
          <table:table-cell office:value-type="string" calcext:value-type="string">
            <text:p>N</text:p>
          </table:table-cell>
          <table:table-cell table:formula="of:=VLOOKUP([.I286];[$レアリティ番号.$A$1:$レアリティ番号.$B$4];2;0)" office:value-type="float" office:value="1" calcext:value-type="float">
            <text:p>1</text:p>
          </table:table-cell>
          <table:table-cell office:value-type="string" calcext:value-type="string">
            <text:p>ハイケイ</text:p>
          </table:table-cell>
          <table:table-cell table:formula="of:=VLOOKUP([.K286];[$種類番号.$A$1:$種類番号.$B$4];2;0)" office:value-type="float" office:value="2" calcext:value-type="float">
            <text:p>2</text:p>
          </table:table-cell>
          <table:table-cell office:value-type="string" calcext:value-type="string">
            <text:p>黄</text:p>
          </table:table-cell>
          <table:table-cell table:formula="of:=VLOOKUP([.M286];[$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6];[$能力語番号.$A$1:$能力語番号.$B$10];2;0);0)" office:value-type="float" office:value="0" calcext:value-type="float">
            <text:p>0</text:p>
          </table:table-cell>
          <table:table-cell office:value-type="string" calcext:value-type="string">
            <text:p>美術</text:p>
          </table:table-cell>
          <table:table-cell table:formula="of:=IFERROR(VLOOKUP([.$S286];[$特性番号.$A$1:$特性番号.$B$8];2;0);0)" office:value-type="float" office:value="2" calcext:value-type="float">
            <text:p>2</text:p>
          </table:table-cell>
          <table:table-cell office:value-type="string" calcext:value-type="string">
            <text:p>戦場に置かれたとき、自分の戦場に黄の「美術」カードが3つ以上あるなら発動できる。自分の山札の上から1枚と、自分の山札の下から1枚を裏のまま魔力ゾーンに置く。</text:p>
          </table:table-cell>
          <table:table-cell table:style-name="ce8" office:value-type="string" calcext:value-type="string">
            <text:p>山札の上か下に戻す</text:p>
          </table:table-cell>
          <table:table-cell table:formula="of:=IFERROR(VLOOKUP([.$V286];[$遺業能力番号.$A$1:$遺業能力番号.$B$9];2;0);0)" office:value-type="float" office:value="7" calcext:value-type="float">
            <text:p>7</text:p>
          </table:table-cell>
          <table:table-cell office:value-type="string" calcext:value-type="string">
            <text:p>https://one-draw.jp/ijinden/cardlist/003/card/03_057.png</text:p>
          </table:table-cell>
          <table:table-cell table:formula="of:=CONCATENATE([$JSON.$A$1];[.$C286];[$JSON.$B$1];[.$E286];[$JSON.$C$1];[.$F286];[$JSON.$D$1];IF(ISNA([.$S286]);&quot;null&quot;;&quot;&quot;&quot;&quot;&amp;[.$S286]&amp;&quot;&quot;&quot;&quot;);[$JSON.$E$1];[.$U286];[$JSON.$F$1];IF(ISNA([.$V286]);&quot;null&quot;;&quot;&quot;&quot;&quot;&amp;[.$V286]&amp;&quot;&quot;&quot;&quot;);[$JSON.$G$1];[.$X286];[$JSON.$H$1];[.$H286];[$JSON.$I$1];[.J286];[$JSON.$J$1];[.$L286];[$JSON.$K$1];[.$O286];[$JSON.$L$1];[.$N286];[$JSON.$M$1];[.$R286];[$JSON.$N$1];[.$T286];[$JSON.$O$1];[.$W286];[$JSON.$P$1];[.$A286];[$JSON.$Q$1];[.$B286];[$JSON.$R$1])" office:value-type="string" office:string-value="{&quot;id&quot;:&quot;3-57&quot;,&quot;name&quot;:&quot;風神雷神図&quot;,&quot;kana&quot;:&quot;ふうじんらいじんず&quot;,&quot;traitText&quot;:&quot;美術&quot;,&quot;ruleText&quot;:&quot;戦場に置かれたとき、自分の戦場に黄の「美術」カードが3つ以上あるなら発動できる。自分の山札の上から1枚と、自分の山札の下から1枚を裏のまま魔力ゾーンに置く。&quot;,&quot;legacyText&quot;:&quot;山札の上か下に戻す&quot;,&quot;imageUrl&quot;:&quot;https://one-draw.jp/ijinden/cardlist/003/card/03_057.png&quot;,&quot;expansion&quot;:35,&quot;rarity&quot;:1,&quot;type&quot;:2,&quot;level&quot;:4,&quot;color&quot;:8,&quot;term&quot;:0,&quot;trait&quot;:2,&quot;legacy&quot;:7,&quot;orderTable&quot;:285,&quot;orderDeck&quot;:264}," calcext:value-type="string">
            <text:p>{"id":"3-57","name":"風神雷神図","kana":"ふうじんらいじんず","traitText":"美術","ruleText":"戦場に置かれたとき、自分の戦場に黄の「美術」カードが3つ以上あるなら発動できる。自分の山札の上から1枚と、自分の山札の下から1枚を裏のまま魔力ゾーンに置く。","legacyText":"山札の上か下に戻す","imageUrl":"https://one-draw.jp/ijinden/cardlist/003/card/03_057.png","expansion":35,"rarity":1,"type":2,"level":4,"color":8,"term":0,"trait":2,"legacy":7,"orderTable":285,"orderDeck":264},</text:p>
          </table:table-cell>
          <table:table-cell table:number-columns-repeated="16347"/>
        </table:table-row>
        <table:table-row table:style-name="ro2">
          <table:table-cell office:value-type="float" office:value="286" calcext:value-type="float">
            <text:p>286</text:p>
          </table:table-cell>
          <table:table-cell office:value-type="float" office:value="257" calcext:value-type="float">
            <text:p>257</text:p>
          </table:table-cell>
          <table:table-cell office:value-type="string" calcext:value-type="string">
            <text:p>3-58</text:p>
          </table:table-cell>
          <table:table-cell office:value-type="float" office:value="58" calcext:value-type="float">
            <text:p>58</text:p>
          </table:table-cell>
          <table:table-cell office:value-type="string" calcext:value-type="string">
            <text:p>茅葺き屋根の張出し舞台</text:p>
          </table:table-cell>
          <table:table-cell office:value-type="string" calcext:value-type="string">
            <text:p>かやぶきやねのはりだしぶたい</text:p>
          </table:table-cell>
          <table:table-cell office:value-type="string" calcext:value-type="string">
            <text:p>第３弾ブースターパック</text:p>
          </table:table-cell>
          <table:table-cell table:formula="of:=VLOOKUP([.G287];[$収録番号.$A$1:$収録番号.$B$9];2;0)" office:value-type="float" office:value="35" calcext:value-type="float">
            <text:p>35</text:p>
          </table:table-cell>
          <table:table-cell office:value-type="string" calcext:value-type="string">
            <text:p>N</text:p>
          </table:table-cell>
          <table:table-cell table:formula="of:=VLOOKUP([.I287];[$レアリティ番号.$A$1:$レアリティ番号.$B$4];2;0)" office:value-type="float" office:value="1" calcext:value-type="float">
            <text:p>1</text:p>
          </table:table-cell>
          <table:table-cell office:value-type="string" calcext:value-type="string">
            <text:p>ハイケイ</text:p>
          </table:table-cell>
          <table:table-cell table:formula="of:=VLOOKUP([.K287];[$種類番号.$A$1:$種類番号.$B$4];2;0)" office:value-type="float" office:value="2" calcext:value-type="float">
            <text:p>2</text:p>
          </table:table-cell>
          <table:table-cell office:value-type="string" calcext:value-type="string">
            <text:p>黄</text:p>
          </table:table-cell>
          <table:table-cell table:formula="of:=VLOOKUP([.M287];[$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7];[$特性番号.$A$1:$特性番号.$B$8];2;0);0)" office:value-type="float" office:value="0" calcext:value-type="float">
            <text:p>0</text:p>
          </table:table-cell>
          <table:table-cell office:value-type="string" calcext:value-type="string">
            <text:p>戦場に置かれたとき、自分の戦場の「執筆」を持つイジン1体を手札に戻して発動できる。イジン召喚権+1する。¶相手のターンの間、黄でないカードの「執筆」は発動しない。</text:p>
          </table:table-cell>
          <table:table-cell table:style-name="ce8" office:value-type="string" calcext:value-type="string">
            <text:p>山札の上か下に戻す</text:p>
          </table:table-cell>
          <table:table-cell table:formula="of:=IFERROR(VLOOKUP([.$V287];[$遺業能力番号.$A$1:$遺業能力番号.$B$9];2;0);0)" office:value-type="float" office:value="7" calcext:value-type="float">
            <text:p>7</text:p>
          </table:table-cell>
          <table:table-cell office:value-type="string" calcext:value-type="string">
            <text:p>https://one-draw.jp/ijinden/cardlist/003/card/03_058.png</text:p>
          </table:table-cell>
          <table:table-cell table:formula="of:=CONCATENATE([$JSON.$A$1];[.$C287];[$JSON.$B$1];[.$E287];[$JSON.$C$1];[.$F287];[$JSON.$D$1];IF(ISNA([.$S287]);&quot;null&quot;;&quot;&quot;&quot;&quot;&amp;[.$S287]&amp;&quot;&quot;&quot;&quot;);[$JSON.$E$1];[.$U287];[$JSON.$F$1];IF(ISNA([.$V287]);&quot;null&quot;;&quot;&quot;&quot;&quot;&amp;[.$V287]&amp;&quot;&quot;&quot;&quot;);[$JSON.$G$1];[.$X287];[$JSON.$H$1];[.$H287];[$JSON.$I$1];[.J287];[$JSON.$J$1];[.$L287];[$JSON.$K$1];[.$O287];[$JSON.$L$1];[.$N287];[$JSON.$M$1];[.$R287];[$JSON.$N$1];[.$T287];[$JSON.$O$1];[.$W287];[$JSON.$P$1];[.$A287];[$JSON.$Q$1];[.$B287];[$JSON.$R$1])" office:value-type="string" office:string-value="{&quot;id&quot;:&quot;3-58&quot;,&quot;name&quot;:&quot;茅葺き屋根の張出し舞台&quot;,&quot;kana&quot;:&quot;かやぶきやねのはりだしぶたい&quot;,&quot;traitText&quot;:null,&quot;ruleText&quot;:&quot;戦場に置かれたとき、自分の戦場の「執筆」を持つイジン1体を手札に戻して発動できる。イジン召喚権+1する。¶相手のターンの間、黄でないカードの「執筆」は発動しない。&quot;,&quot;legacyText&quot;:&quot;山札の上か下に戻す&quot;,&quot;imageUrl&quot;:&quot;https://one-draw.jp/ijinden/cardlist/003/card/03_058.png&quot;,&quot;expansion&quot;:35,&quot;rarity&quot;:1,&quot;type&quot;:2,&quot;level&quot;:3,&quot;color&quot;:8,&quot;term&quot;:0,&quot;trait&quot;:0,&quot;legacy&quot;:7,&quot;orderTable&quot;:286,&quot;orderDeck&quot;:257}," calcext:value-type="string">
            <text:p>{"id":"3-58","name":"茅葺き屋根の張出し舞台","kana":"かやぶきやねのはりだしぶたい","traitText":null,"ruleText":"戦場に置かれたとき、自分の戦場の「執筆」を持つイジン1体を手札に戻して発動できる。イジン召喚権+1する。¶相手のターンの間、黄でないカードの「執筆」は発動しない。","legacyText":"山札の上か下に戻す","imageUrl":"https://one-draw.jp/ijinden/cardlist/003/card/03_058.png","expansion":35,"rarity":1,"type":2,"level":3,"color":8,"term":0,"trait":0,"legacy":7,"orderTable":286,"orderDeck":257},</text:p>
          </table:table-cell>
          <table:table-cell table:number-columns-repeated="16347"/>
        </table:table-row>
        <table:table-row table:style-name="ro2">
          <table:table-cell office:value-type="float" office:value="287" calcext:value-type="float">
            <text:p>287</text:p>
          </table:table-cell>
          <table:table-cell office:value-type="float" office:value="247" calcext:value-type="float">
            <text:p>247</text:p>
          </table:table-cell>
          <table:table-cell office:value-type="string" calcext:value-type="string">
            <text:p>3-59</text:p>
          </table:table-cell>
          <table:table-cell office:value-type="float" office:value="59" calcext:value-type="float">
            <text:p>59</text:p>
          </table:table-cell>
          <table:table-cell office:value-type="string" calcext:value-type="string">
            <text:p>森閑たる離宮</text:p>
          </table:table-cell>
          <table:table-cell office:value-type="string" calcext:value-type="string">
            <text:p>しんかんたるりきゅう</text:p>
          </table:table-cell>
          <table:table-cell office:value-type="string" calcext:value-type="string">
            <text:p>第３弾ブースターパック</text:p>
          </table:table-cell>
          <table:table-cell table:formula="of:=VLOOKUP([.G288];[$収録番号.$A$1:$収録番号.$B$9];2;0)" office:value-type="float" office:value="35" calcext:value-type="float">
            <text:p>35</text:p>
          </table:table-cell>
          <table:table-cell office:value-type="string" calcext:value-type="string">
            <text:p>N</text:p>
          </table:table-cell>
          <table:table-cell table:formula="of:=VLOOKUP([.I288];[$レアリティ番号.$A$1:$レアリティ番号.$B$4];2;0)" office:value-type="float" office:value="1" calcext:value-type="float">
            <text:p>1</text:p>
          </table:table-cell>
          <table:table-cell office:value-type="string" calcext:value-type="string">
            <text:p>ハイケイ</text:p>
          </table:table-cell>
          <table:table-cell table:formula="of:=VLOOKUP([.K288];[$種類番号.$A$1:$種類番号.$B$4];2;0)" office:value-type="float" office:value="2" calcext:value-type="float">
            <text:p>2</text:p>
          </table:table-cell>
          <table:table-cell office:value-type="string" calcext:value-type="string">
            <text:p>紫</text:p>
          </table:table-cell>
          <table:table-cell table:formula="of:=VLOOKUP([.M288];[$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8];[$特性番号.$A$1:$特性番号.$B$8];2;0);0)" office:value-type="float" office:value="0" calcext:value-type="float">
            <text:p>0</text:p>
          </table:table-cell>
          <table:table-cell office:value-type="string" calcext:value-type="string">
            <text:p>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text:p>
          </table:table-cell>
          <table:table-cell table:style-name="ce8" table:formula="of:=NA()" office:value-type="string" office:string-value="" calcext:value-type="error">
            <text:p>#N/A</text:p>
          </table:table-cell>
          <table:table-cell table:formula="of:=IFERROR(VLOOKUP([.$V288];[$遺業能力番号.$A$1:$遺業能力番号.$B$9];2;0);0)" office:value-type="float" office:value="0" calcext:value-type="float">
            <text:p>0</text:p>
          </table:table-cell>
          <table:table-cell office:value-type="string" calcext:value-type="string">
            <text:p>https://one-draw.jp/ijinden/cardlist/003/card/03_059.png</text:p>
          </table:table-cell>
          <table:table-cell table:formula="of:=CONCATENATE([$JSON.$A$1];[.$C288];[$JSON.$B$1];[.$E288];[$JSON.$C$1];[.$F288];[$JSON.$D$1];IF(ISNA([.$S288]);&quot;null&quot;;&quot;&quot;&quot;&quot;&amp;[.$S288]&amp;&quot;&quot;&quot;&quot;);[$JSON.$E$1];[.$U288];[$JSON.$F$1];IF(ISNA([.$V288]);&quot;null&quot;;&quot;&quot;&quot;&quot;&amp;[.$V288]&amp;&quot;&quot;&quot;&quot;);[$JSON.$G$1];[.$X288];[$JSON.$H$1];[.$H288];[$JSON.$I$1];[.J288];[$JSON.$J$1];[.$L288];[$JSON.$K$1];[.$O288];[$JSON.$L$1];[.$N288];[$JSON.$M$1];[.$R288];[$JSON.$N$1];[.$T288];[$JSON.$O$1];[.$W288];[$JSON.$P$1];[.$A288];[$JSON.$Q$1];[.$B288];[$JSON.$R$1])" office:value-type="string" office:string-value="{&quot;id&quot;:&quot;3-59&quot;,&quot;name&quot;:&quot;森閑たる離宮&quot;,&quot;kana&quot;:&quot;しんかんたるりきゅう&quot;,&quot;traitText&quot;:null,&quot;ruleText&quot;:&quot;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quot;,&quot;legacyText&quot;:null,&quot;imageUrl&quot;:&quot;https://one-draw.jp/ijinden/cardlist/003/card/03_059.png&quot;,&quot;expansion&quot;:35,&quot;rarity&quot;:1,&quot;type&quot;:2,&quot;level&quot;:2,&quot;color&quot;:16,&quot;term&quot;:0,&quot;trait&quot;:0,&quot;legacy&quot;:0,&quot;orderTable&quot;:287,&quot;orderDeck&quot;:247}," calcext:value-type="string">
            <text:p>{"id":"3-59","name":"森閑たる離宮","kana":"しんかんたるりきゅう","traitText":null,"ruleText":"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legacyText":null,"imageUrl":"https://one-draw.jp/ijinden/cardlist/003/card/03_059.png","expansion":35,"rarity":1,"type":2,"level":2,"color":16,"term":0,"trait":0,"legacy":0,"orderTable":287,"orderDeck":247},</text:p>
          </table:table-cell>
          <table:table-cell table:number-columns-repeated="16347"/>
        </table:table-row>
        <table:table-row table:style-name="ro2">
          <table:table-cell office:value-type="float" office:value="288" calcext:value-type="float">
            <text:p>288</text:p>
          </table:table-cell>
          <table:table-cell office:value-type="float" office:value="278" calcext:value-type="float">
            <text:p>278</text:p>
          </table:table-cell>
          <table:table-cell office:value-type="string" calcext:value-type="string">
            <text:p>3-60</text:p>
          </table:table-cell>
          <table:table-cell office:value-type="float" office:value="60" calcext:value-type="float">
            <text:p>60</text:p>
          </table:table-cell>
          <table:table-cell office:value-type="string" calcext:value-type="string">
            <text:p>黒船</text:p>
          </table:table-cell>
          <table:table-cell office:value-type="string" calcext:value-type="string">
            <text:p>くろふね</text:p>
          </table:table-cell>
          <table:table-cell office:value-type="string" calcext:value-type="string">
            <text:p>第３弾ブースターパック</text:p>
          </table:table-cell>
          <table:table-cell table:formula="of:=VLOOKUP([.G289];[$収録番号.$A$1:$収録番号.$B$9];2;0)" office:value-type="float" office:value="35" calcext:value-type="float">
            <text:p>35</text:p>
          </table:table-cell>
          <table:table-cell office:value-type="string" calcext:value-type="string">
            <text:p>N</text:p>
          </table:table-cell>
          <table:table-cell table:formula="of:=VLOOKUP([.I289];[$レアリティ番号.$A$1:$レアリティ番号.$B$4];2;0)" office:value-type="float" office:value="1" calcext:value-type="float">
            <text:p>1</text:p>
          </table:table-cell>
          <table:table-cell office:value-type="string" calcext:value-type="string">
            <text:p>ハイケイ</text:p>
          </table:table-cell>
          <table:table-cell table:formula="of:=VLOOKUP([.K289];[$種類番号.$A$1:$種類番号.$B$4];2;0)" office:value-type="float" office:value="2" calcext:value-type="float">
            <text:p>2</text:p>
          </table:table-cell>
          <table:table-cell office:value-type="string" calcext:value-type="string">
            <text:p>紫</text:p>
          </table:table-cell>
          <table:table-cell table:formula="of:=VLOOKUP([.M289];[$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9];[$特性番号.$A$1:$特性番号.$B$8];2;0);0)" office:value-type="float" office:value="0" calcext:value-type="float">
            <text:p>0</text:p>
          </table:table-cell>
          <table:table-cell office:value-type="string" calcext:value-type="string">
            <text:p>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text:p>
          </table:table-cell>
          <table:table-cell table:style-name="ce8" table:formula="of:=NA()" office:value-type="string" office:string-value="" calcext:value-type="error">
            <text:p>#N/A</text:p>
          </table:table-cell>
          <table:table-cell table:formula="of:=IFERROR(VLOOKUP([.$V289];[$遺業能力番号.$A$1:$遺業能力番号.$B$9];2;0);0)" office:value-type="float" office:value="0" calcext:value-type="float">
            <text:p>0</text:p>
          </table:table-cell>
          <table:table-cell office:value-type="string" calcext:value-type="string">
            <text:p>https://one-draw.jp/ijinden/cardlist/003/card/03_060.png</text:p>
          </table:table-cell>
          <table:table-cell table:formula="of:=CONCATENATE([$JSON.$A$1];[.$C289];[$JSON.$B$1];[.$E289];[$JSON.$C$1];[.$F289];[$JSON.$D$1];IF(ISNA([.$S289]);&quot;null&quot;;&quot;&quot;&quot;&quot;&amp;[.$S289]&amp;&quot;&quot;&quot;&quot;);[$JSON.$E$1];[.$U289];[$JSON.$F$1];IF(ISNA([.$V289]);&quot;null&quot;;&quot;&quot;&quot;&quot;&amp;[.$V289]&amp;&quot;&quot;&quot;&quot;);[$JSON.$G$1];[.$X289];[$JSON.$H$1];[.$H289];[$JSON.$I$1];[.J289];[$JSON.$J$1];[.$L289];[$JSON.$K$1];[.$O289];[$JSON.$L$1];[.$N289];[$JSON.$M$1];[.$R289];[$JSON.$N$1];[.$T289];[$JSON.$O$1];[.$W289];[$JSON.$P$1];[.$A289];[$JSON.$Q$1];[.$B289];[$JSON.$R$1])" office:value-type="string" office:string-value="{&quot;id&quot;:&quot;3-60&quot;,&quot;name&quot;:&quot;黒船&quot;,&quot;kana&quot;:&quot;くろふね&quot;,&quot;traitText&quot;:null,&quot;ruleText&quot;:&quot;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quot;,&quot;legacyText&quot;:null,&quot;imageUrl&quot;:&quot;https://one-draw.jp/ijinden/cardlist/003/card/03_060.png&quot;,&quot;expansion&quot;:35,&quot;rarity&quot;:1,&quot;type&quot;:2,&quot;level&quot;:6,&quot;color&quot;:16,&quot;term&quot;:0,&quot;trait&quot;:0,&quot;legacy&quot;:0,&quot;orderTable&quot;:288,&quot;orderDeck&quot;:278}," calcext:value-type="string">
            <text:p>{"id":"3-60","name":"黒船","kana":"くろふね","traitText":null,"ruleText":"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legacyText":null,"imageUrl":"https://one-draw.jp/ijinden/cardlist/003/card/03_060.png","expansion":35,"rarity":1,"type":2,"level":6,"color":16,"term":0,"trait":0,"legacy":0,"orderTable":288,"orderDeck":278},</text:p>
          </table:table-cell>
          <table:table-cell table:number-columns-repeated="16347"/>
        </table:table-row>
        <table:table-row table:style-name="ro2">
          <table:table-cell office:value-type="float" office:value="289" calcext:value-type="float">
            <text:p>289</text:p>
          </table:table-cell>
          <table:table-cell office:value-type="float" office:value="333" calcext:value-type="float">
            <text:p>333</text:p>
          </table:table-cell>
          <table:table-cell office:value-type="string" calcext:value-type="string">
            <text:p>3-61</text:p>
          </table:table-cell>
          <table:table-cell office:value-type="float" office:value="61" calcext:value-type="float">
            <text:p>61</text:p>
          </table:table-cell>
          <table:table-cell office:value-type="string" calcext:value-type="string">
            <text:p>サンダーボルト</text:p>
          </table:table-cell>
          <table:table-cell office:value-type="string" calcext:value-type="string">
            <text:p>さんだーぼると</text:p>
          </table:table-cell>
          <table:table-cell office:value-type="string" calcext:value-type="string">
            <text:p>第３弾ブースターパック</text:p>
          </table:table-cell>
          <table:table-cell table:formula="of:=VLOOKUP([.G290];[$収録番号.$A$1:$収録番号.$B$9];2;0)" office:value-type="float" office:value="35" calcext:value-type="float">
            <text:p>35</text:p>
          </table:table-cell>
          <table:table-cell office:value-type="string" calcext:value-type="string">
            <text:p>R</text:p>
          </table:table-cell>
          <table:table-cell table:formula="of:=VLOOKUP([.I290];[$レアリティ番号.$A$1:$レアリティ番号.$B$4];2;0)" office:value-type="float" office:value="2" calcext:value-type="float">
            <text:p>2</text:p>
          </table:table-cell>
          <table:table-cell office:value-type="string" calcext:value-type="string">
            <text:p>マホウ</text:p>
          </table:table-cell>
          <table:table-cell table:formula="of:=VLOOKUP([.K290];[$種類番号.$A$1:$種類番号.$B$4];2;0)" office:value-type="float" office:value="3" calcext:value-type="float">
            <text:p>3</text:p>
          </table:table-cell>
          <table:table-cell office:value-type="string" calcext:value-type="string">
            <text:p>赤</text:p>
          </table:table-cell>
          <table:table-cell table:formula="of:=VLOOKUP([.M290];[$色番号.$A$1:$色番号.$B$10];2;0)"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formula="of:=NA()" office:value-type="string" office:string-value="" calcext:value-type="error">
            <text:p>#N/A</text:p>
          </table:table-cell>
          <table:table-cell table:formula="of:=IFERROR(VLOOKUP([.$Q29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0];[$特性番号.$A$1:$特性番号.$B$8];2;0);0)" office:value-type="float" office:value="0" calcext:value-type="float">
            <text:p>0</text:p>
          </table:table-cell>
          <table:table-cell office:value-type="string" calcext:value-type="string">
            <text:p>相手の戦場のパワー4000以下のイジンすべてと、相手の戦場のハイケイすべてを破壊する。相手は、このターンに限り「自分の墓地の「冥府発動」でない遺業能力は発動しない」を得る。</text:p>
          </table:table-cell>
          <table:table-cell table:style-name="ce8" office:value-type="string" calcext:value-type="string">
            <text:p>魔力化</text:p>
          </table:table-cell>
          <table:table-cell table:formula="of:=IFERROR(VLOOKUP([.$V290];[$遺業能力番号.$A$1:$遺業能力番号.$B$9];2;0);0)" office:value-type="float" office:value="1" calcext:value-type="float">
            <text:p>1</text:p>
          </table:table-cell>
          <table:table-cell office:value-type="string" calcext:value-type="string">
            <text:p>https://one-draw.jp/ijinden/cardlist/003/card/03_061.png</text:p>
          </table:table-cell>
          <table:table-cell table:formula="of:=CONCATENATE([$JSON.$A$1];[.$C290];[$JSON.$B$1];[.$E290];[$JSON.$C$1];[.$F290];[$JSON.$D$1];IF(ISNA([.$S290]);&quot;null&quot;;&quot;&quot;&quot;&quot;&amp;[.$S290]&amp;&quot;&quot;&quot;&quot;);[$JSON.$E$1];[.$U290];[$JSON.$F$1];IF(ISNA([.$V290]);&quot;null&quot;;&quot;&quot;&quot;&quot;&amp;[.$V290]&amp;&quot;&quot;&quot;&quot;);[$JSON.$G$1];[.$X290];[$JSON.$H$1];[.$H290];[$JSON.$I$1];[.J290];[$JSON.$J$1];[.$L290];[$JSON.$K$1];[.$O290];[$JSON.$L$1];[.$N290];[$JSON.$M$1];[.$R290];[$JSON.$N$1];[.$T290];[$JSON.$O$1];[.$W290];[$JSON.$P$1];[.$A290];[$JSON.$Q$1];[.$B290];[$JSON.$R$1])" office:value-type="string" office:string-value="{&quot;id&quot;:&quot;3-61&quot;,&quot;name&quot;:&quot;サンダーボルト&quot;,&quot;kana&quot;:&quot;さんだーぼると&quot;,&quot;traitText&quot;:null,&quot;ruleText&quot;:&quot;相手の戦場のパワー4000以下のイジンすべてと、相手の戦場のハイケイすべてを破壊する。相手は、このターンに限り「自分の墓地の「冥府発動」でない遺業能力は発動しない」を得る。&quot;,&quot;legacyText&quot;:&quot;魔力化&quot;,&quot;imageUrl&quot;:&quot;https://one-draw.jp/ijinden/cardlist/003/card/03_061.png&quot;,&quot;expansion&quot;:35,&quot;rarity&quot;:2,&quot;type&quot;:3,&quot;level&quot;:6,&quot;color&quot;:1,&quot;term&quot;:0,&quot;trait&quot;:0,&quot;legacy&quot;:1,&quot;orderTable&quot;:289,&quot;orderDeck&quot;:333}," calcext:value-type="string">
            <text:p>{"id":"3-61","name":"サンダーボルト","kana":"さんだーぼると","traitText":null,"ruleText":"相手の戦場のパワー4000以下のイジンすべてと、相手の戦場のハイケイすべてを破壊する。相手は、このターンに限り「自分の墓地の「冥府発動」でない遺業能力は発動しない」を得る。","legacyText":"魔力化","imageUrl":"https://one-draw.jp/ijinden/cardlist/003/card/03_061.png","expansion":35,"rarity":2,"type":3,"level":6,"color":1,"term":0,"trait":0,"legacy":1,"orderTable":289,"orderDeck":333},</text:p>
          </table:table-cell>
          <table:table-cell table:number-columns-repeated="16347"/>
        </table:table-row>
        <table:table-row table:style-name="ro2">
          <table:table-cell office:value-type="float" office:value="290" calcext:value-type="float">
            <text:p>290</text:p>
          </table:table-cell>
          <table:table-cell office:value-type="float" office:value="293" calcext:value-type="float">
            <text:p>293</text:p>
          </table:table-cell>
          <table:table-cell office:value-type="string" calcext:value-type="string">
            <text:p>3-62</text:p>
          </table:table-cell>
          <table:table-cell office:value-type="float" office:value="62" calcext:value-type="float">
            <text:p>62</text:p>
          </table:table-cell>
          <table:table-cell office:value-type="string" calcext:value-type="string">
            <text:p>パイロオーラ</text:p>
          </table:table-cell>
          <table:table-cell office:value-type="string" calcext:value-type="string">
            <text:p>ぱいろおーら</text:p>
          </table:table-cell>
          <table:table-cell office:value-type="string" calcext:value-type="string">
            <text:p>第３弾ブースターパック</text:p>
          </table:table-cell>
          <table:table-cell table:formula="of:=VLOOKUP([.G291];[$収録番号.$A$1:$収録番号.$B$9];2;0)" office:value-type="float" office:value="35" calcext:value-type="float">
            <text:p>35</text:p>
          </table:table-cell>
          <table:table-cell office:value-type="string" calcext:value-type="string">
            <text:p>N</text:p>
          </table:table-cell>
          <table:table-cell table:formula="of:=VLOOKUP([.I291];[$レアリティ番号.$A$1:$レアリティ番号.$B$4];2;0)" office:value-type="float" office:value="1" calcext:value-type="float">
            <text:p>1</text:p>
          </table:table-cell>
          <table:table-cell office:value-type="string" calcext:value-type="string">
            <text:p>マホウ</text:p>
          </table:table-cell>
          <table:table-cell table:formula="of:=VLOOKUP([.K291];[$種類番号.$A$1:$種類番号.$B$4];2;0)" office:value-type="float" office:value="3" calcext:value-type="float">
            <text:p>3</text:p>
          </table:table-cell>
          <table:table-cell office:value-type="string" calcext:value-type="string">
            <text:p>赤</text:p>
          </table:table-cell>
          <table:table-cell table:formula="of:=VLOOKUP([.M291];[$色番号.$A$1:$色番号.$B$10];2;0)"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9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1];[$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赤の間「アタック+4000」を得る。</text:p>
          </table:table-cell>
          <table:table-cell table:style-name="ce8" office:value-type="string" calcext:value-type="string">
            <text:p>魔力化</text:p>
          </table:table-cell>
          <table:table-cell table:formula="of:=IFERROR(VLOOKUP([.$V291];[$遺業能力番号.$A$1:$遺業能力番号.$B$9];2;0);0)" office:value-type="float" office:value="1" calcext:value-type="float">
            <text:p>1</text:p>
          </table:table-cell>
          <table:table-cell office:value-type="string" calcext:value-type="string">
            <text:p>https://one-draw.jp/ijinden/cardlist/003/card/03_062.png</text:p>
          </table:table-cell>
          <table:table-cell table:formula="of:=CONCATENATE([$JSON.$A$1];[.$C291];[$JSON.$B$1];[.$E291];[$JSON.$C$1];[.$F291];[$JSON.$D$1];IF(ISNA([.$S291]);&quot;null&quot;;&quot;&quot;&quot;&quot;&amp;[.$S291]&amp;&quot;&quot;&quot;&quot;);[$JSON.$E$1];[.$U291];[$JSON.$F$1];IF(ISNA([.$V291]);&quot;null&quot;;&quot;&quot;&quot;&quot;&amp;[.$V291]&amp;&quot;&quot;&quot;&quot;);[$JSON.$G$1];[.$X291];[$JSON.$H$1];[.$H291];[$JSON.$I$1];[.J291];[$JSON.$J$1];[.$L291];[$JSON.$K$1];[.$O291];[$JSON.$L$1];[.$N291];[$JSON.$M$1];[.$R291];[$JSON.$N$1];[.$T291];[$JSON.$O$1];[.$W291];[$JSON.$P$1];[.$A291];[$JSON.$Q$1];[.$B291];[$JSON.$R$1])" office:value-type="string" office:string-value="{&quot;id&quot;:&quot;3-62&quot;,&quot;name&quot;:&quot;パイロオーラ&quot;,&quot;kana&quot;:&quot;ぱいろおーら&quot;,&quot;traitText&quot;:null,&quot;ruleText&quot;:&quot;1ドローする。¶マホウ使用によって墓地に置かれる際「冥装」を得た状態で墓地に置かれる。¶装備 : これが赤の間「アタック+4000」を得る。&quot;,&quot;legacyText&quot;:&quot;魔力化&quot;,&quot;imageUrl&quot;:&quot;https://one-draw.jp/ijinden/cardlist/003/card/03_062.png&quot;,&quot;expansion&quot;:35,&quot;rarity&quot;:1,&quot;type&quot;:3,&quot;level&quot;:2,&quot;color&quot;:1,&quot;term&quot;:0,&quot;trait&quot;:0,&quot;legacy&quot;:1,&quot;orderTable&quot;:290,&quot;orderDeck&quot;:293}," calcext:value-type="string">
            <text:p>{"id":"3-62","name":"パイロオーラ","kana":"ぱいろおーら","traitText":null,"ruleText":"1ドローする。¶マホウ使用によって墓地に置かれる際「冥装」を得た状態で墓地に置かれる。¶装備 : これが赤の間「アタック+4000」を得る。","legacyText":"魔力化","imageUrl":"https://one-draw.jp/ijinden/cardlist/003/card/03_062.png","expansion":35,"rarity":1,"type":3,"level":2,"color":1,"term":0,"trait":0,"legacy":1,"orderTable":290,"orderDeck":293},</text:p>
          </table:table-cell>
          <table:table-cell table:number-columns-repeated="16347"/>
        </table:table-row>
        <table:table-row table:style-name="ro2">
          <table:table-cell office:value-type="float" office:value="291" calcext:value-type="float">
            <text:p>291</text:p>
          </table:table-cell>
          <table:table-cell office:value-type="float" office:value="336" calcext:value-type="float">
            <text:p>336</text:p>
          </table:table-cell>
          <table:table-cell office:value-type="string" calcext:value-type="string">
            <text:p>3-63</text:p>
          </table:table-cell>
          <table:table-cell office:value-type="float" office:value="63" calcext:value-type="float">
            <text:p>63</text:p>
          </table:table-cell>
          <table:table-cell office:value-type="string" calcext:value-type="string">
            <text:p>アイオン</text:p>
          </table:table-cell>
          <table:table-cell office:value-type="string" calcext:value-type="string">
            <text:p>あいおん</text:p>
          </table:table-cell>
          <table:table-cell office:value-type="string" calcext:value-type="string">
            <text:p>第３弾ブースターパック</text:p>
          </table:table-cell>
          <table:table-cell table:formula="of:=VLOOKUP([.G292];[$収録番号.$A$1:$収録番号.$B$9];2;0)" office:value-type="float" office:value="35" calcext:value-type="float">
            <text:p>35</text:p>
          </table:table-cell>
          <table:table-cell office:value-type="string" calcext:value-type="string">
            <text:p>R</text:p>
          </table:table-cell>
          <table:table-cell table:formula="of:=VLOOKUP([.I292];[$レアリティ番号.$A$1:$レアリティ番号.$B$4];2;0)" office:value-type="float" office:value="2" calcext:value-type="float">
            <text:p>2</text:p>
          </table:table-cell>
          <table:table-cell office:value-type="string" calcext:value-type="string">
            <text:p>マホウ</text:p>
          </table:table-cell>
          <table:table-cell table:formula="of:=VLOOKUP([.K292];[$種類番号.$A$1:$種類番号.$B$4];2;0)" office:value-type="float" office:value="3" calcext:value-type="float">
            <text:p>3</text:p>
          </table:table-cell>
          <table:table-cell office:value-type="string" calcext:value-type="string">
            <text:p>青</text:p>
          </table:table-cell>
          <table:table-cell table:formula="of:=VLOOKUP([.M292];[$色番号.$A$1:$色番号.$B$10];2;0)" office:value-type="float" office:value="2" calcext:value-type="float">
            <text:p>2</text:p>
          </table:table-cell>
          <table:table-cell office:value-type="float" office:value="10" calcext:value-type="float">
            <text:p>10</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29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2];[$特性番号.$A$1:$特性番号.$B$8];2;0);0)" office:value-type="float" office:value="0" calcext:value-type="float">
            <text:p>0</text:p>
          </table:table-cell>
          <table:table-cell office:value-type="string" calcext:value-type="string">
            <text:p>これのマホウ使用に際し、これのレベルは、自分の手札の他のカード1つにつき1だけ下がる。¶自分の他の手札すべてを山札に戻してシャッフルし、7ドローする。その後、自分は、このターンに限り「マホウ使用できない」を得る。</text:p>
          </table:table-cell>
          <table:table-cell table:style-name="ce8" office:value-type="string" calcext:value-type="string">
            <text:p>手札に戻す</text:p>
          </table:table-cell>
          <table:table-cell table:formula="of:=IFERROR(VLOOKUP([.$V292];[$遺業能力番号.$A$1:$遺業能力番号.$B$9];2;0);0)" office:value-type="float" office:value="5" calcext:value-type="float">
            <text:p>5</text:p>
          </table:table-cell>
          <table:table-cell office:value-type="string" calcext:value-type="string">
            <text:p>https://one-draw.jp/ijinden/cardlist/003/card/03_063.png</text:p>
          </table:table-cell>
          <table:table-cell table:formula="of:=CONCATENATE([$JSON.$A$1];[.$C292];[$JSON.$B$1];[.$E292];[$JSON.$C$1];[.$F292];[$JSON.$D$1];IF(ISNA([.$S292]);&quot;null&quot;;&quot;&quot;&quot;&quot;&amp;[.$S292]&amp;&quot;&quot;&quot;&quot;);[$JSON.$E$1];[.$U292];[$JSON.$F$1];IF(ISNA([.$V292]);&quot;null&quot;;&quot;&quot;&quot;&quot;&amp;[.$V292]&amp;&quot;&quot;&quot;&quot;);[$JSON.$G$1];[.$X292];[$JSON.$H$1];[.$H292];[$JSON.$I$1];[.J292];[$JSON.$J$1];[.$L292];[$JSON.$K$1];[.$O292];[$JSON.$L$1];[.$N292];[$JSON.$M$1];[.$R292];[$JSON.$N$1];[.$T292];[$JSON.$O$1];[.$W292];[$JSON.$P$1];[.$A292];[$JSON.$Q$1];[.$B292];[$JSON.$R$1])" office:value-type="string" office:string-value="{&quot;id&quot;:&quot;3-63&quot;,&quot;name&quot;:&quot;アイオン&quot;,&quot;kana&quot;:&quot;あいおん&quot;,&quot;traitText&quot;:null,&quot;ruleText&quot;:&quot;これのマホウ使用に際し、これのレベルは、自分の手札の他のカード1つにつき1だけ下がる。¶自分の他の手札すべてを山札に戻してシャッフルし、7ドローする。その後、自分は、このターンに限り「マホウ使用できない」を得る。&quot;,&quot;legacyText&quot;:&quot;手札に戻す&quot;,&quot;imageUrl&quot;:&quot;https://one-draw.jp/ijinden/cardlist/003/card/03_063.png&quot;,&quot;expansion&quot;:35,&quot;rarity&quot;:2,&quot;type&quot;:3,&quot;level&quot;:10,&quot;color&quot;:2,&quot;term&quot;:0,&quot;trait&quot;:0,&quot;legacy&quot;:5,&quot;orderTable&quot;:291,&quot;orderDeck&quot;:336}," calcext:value-type="string">
            <text:p>{"id":"3-63","name":"アイオン","kana":"あいおん","traitText":null,"ruleText":"これのマホウ使用に際し、これのレベルは、自分の手札の他のカード1つにつき1だけ下がる。¶自分の他の手札すべてを山札に戻してシャッフルし、7ドローする。その後、自分は、このターンに限り「マホウ使用できない」を得る。","legacyText":"手札に戻す","imageUrl":"https://one-draw.jp/ijinden/cardlist/003/card/03_063.png","expansion":35,"rarity":2,"type":3,"level":10,"color":2,"term":0,"trait":0,"legacy":5,"orderTable":291,"orderDeck":336},</text:p>
          </table:table-cell>
          <table:table-cell table:number-columns-repeated="16347"/>
        </table:table-row>
        <table:table-row table:style-name="ro2">
          <table:table-cell office:value-type="float" office:value="292" calcext:value-type="float">
            <text:p>292</text:p>
          </table:table-cell>
          <table:table-cell office:value-type="float" office:value="297" calcext:value-type="float">
            <text:p>297</text:p>
          </table:table-cell>
          <table:table-cell office:value-type="string" calcext:value-type="string">
            <text:p>3-64</text:p>
          </table:table-cell>
          <table:table-cell office:value-type="float" office:value="64" calcext:value-type="float">
            <text:p>64</text:p>
          </table:table-cell>
          <table:table-cell office:value-type="string" calcext:value-type="string">
            <text:p>ハイドロオーラ</text:p>
          </table:table-cell>
          <table:table-cell office:value-type="string" calcext:value-type="string">
            <text:p>はいどろおーら</text:p>
          </table:table-cell>
          <table:table-cell office:value-type="string" calcext:value-type="string">
            <text:p>第３弾ブースターパック</text:p>
          </table:table-cell>
          <table:table-cell table:formula="of:=VLOOKUP([.G293];[$収録番号.$A$1:$収録番号.$B$9];2;0)" office:value-type="float" office:value="35" calcext:value-type="float">
            <text:p>35</text:p>
          </table:table-cell>
          <table:table-cell office:value-type="string" calcext:value-type="string">
            <text:p>N</text:p>
          </table:table-cell>
          <table:table-cell table:formula="of:=VLOOKUP([.I293];[$レアリティ番号.$A$1:$レアリティ番号.$B$4];2;0)" office:value-type="float" office:value="1" calcext:value-type="float">
            <text:p>1</text:p>
          </table:table-cell>
          <table:table-cell office:value-type="string" calcext:value-type="string">
            <text:p>マホウ</text:p>
          </table:table-cell>
          <table:table-cell table:formula="of:=VLOOKUP([.K293];[$種類番号.$A$1:$種類番号.$B$4];2;0)" office:value-type="float" office:value="3" calcext:value-type="float">
            <text:p>3</text:p>
          </table:table-cell>
          <table:table-cell office:value-type="string" calcext:value-type="string">
            <text:p>青</text:p>
          </table:table-cell>
          <table:table-cell table:formula="of:=VLOOKUP([.M293];[$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9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3];[$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青の間「ブロック+4000」を得る。</text:p>
          </table:table-cell>
          <table:table-cell table:style-name="ce8" office:value-type="string" calcext:value-type="string">
            <text:p>魔力化</text:p>
          </table:table-cell>
          <table:table-cell table:formula="of:=IFERROR(VLOOKUP([.$V293];[$遺業能力番号.$A$1:$遺業能力番号.$B$9];2;0);0)" office:value-type="float" office:value="1" calcext:value-type="float">
            <text:p>1</text:p>
          </table:table-cell>
          <table:table-cell office:value-type="string" calcext:value-type="string">
            <text:p>https://one-draw.jp/ijinden/cardlist/003/card/03_064.png</text:p>
          </table:table-cell>
          <table:table-cell table:formula="of:=CONCATENATE([$JSON.$A$1];[.$C293];[$JSON.$B$1];[.$E293];[$JSON.$C$1];[.$F293];[$JSON.$D$1];IF(ISNA([.$S293]);&quot;null&quot;;&quot;&quot;&quot;&quot;&amp;[.$S293]&amp;&quot;&quot;&quot;&quot;);[$JSON.$E$1];[.$U293];[$JSON.$F$1];IF(ISNA([.$V293]);&quot;null&quot;;&quot;&quot;&quot;&quot;&amp;[.$V293]&amp;&quot;&quot;&quot;&quot;);[$JSON.$G$1];[.$X293];[$JSON.$H$1];[.$H293];[$JSON.$I$1];[.J293];[$JSON.$J$1];[.$L293];[$JSON.$K$1];[.$O293];[$JSON.$L$1];[.$N293];[$JSON.$M$1];[.$R293];[$JSON.$N$1];[.$T293];[$JSON.$O$1];[.$W293];[$JSON.$P$1];[.$A293];[$JSON.$Q$1];[.$B293];[$JSON.$R$1])" office:value-type="string" office:string-value="{&quot;id&quot;:&quot;3-64&quot;,&quot;name&quot;:&quot;ハイドロオーラ&quot;,&quot;kana&quot;:&quot;はいどろおーら&quot;,&quot;traitText&quot;:null,&quot;ruleText&quot;:&quot;1ドローする。¶マホウ使用によって墓地に置かれる際「冥装」を得た状態で墓地に置かれる。¶装備 : これが青の間「ブロック+4000」を得る。&quot;,&quot;legacyText&quot;:&quot;魔力化&quot;,&quot;imageUrl&quot;:&quot;https://one-draw.jp/ijinden/cardlist/003/card/03_064.png&quot;,&quot;expansion&quot;:35,&quot;rarity&quot;:1,&quot;type&quot;:3,&quot;level&quot;:2,&quot;color&quot;:2,&quot;term&quot;:0,&quot;trait&quot;:0,&quot;legacy&quot;:1,&quot;orderTable&quot;:292,&quot;orderDeck&quot;:297}," calcext:value-type="string">
            <text:p>{"id":"3-64","name":"ハイドロオーラ","kana":"はいどろおーら","traitText":null,"ruleText":"1ドローする。¶マホウ使用によって墓地に置かれる際「冥装」を得た状態で墓地に置かれる。¶装備 : これが青の間「ブロック+4000」を得る。","legacyText":"魔力化","imageUrl":"https://one-draw.jp/ijinden/cardlist/003/card/03_064.png","expansion":35,"rarity":1,"type":3,"level":2,"color":2,"term":0,"trait":0,"legacy":1,"orderTable":292,"orderDeck":297},</text:p>
          </table:table-cell>
          <table:table-cell table:number-columns-repeated="16347"/>
        </table:table-row>
        <table:table-row table:style-name="ro2">
          <table:table-cell office:value-type="float" office:value="293" calcext:value-type="float">
            <text:p>293</text:p>
          </table:table-cell>
          <table:table-cell office:value-type="float" office:value="326" calcext:value-type="float">
            <text:p>326</text:p>
          </table:table-cell>
          <table:table-cell office:value-type="string" calcext:value-type="string">
            <text:p>3-65</text:p>
          </table:table-cell>
          <table:table-cell office:value-type="float" office:value="65" calcext:value-type="float">
            <text:p>65</text:p>
          </table:table-cell>
          <table:table-cell office:value-type="string" calcext:value-type="string">
            <text:p>ソーサリー</text:p>
          </table:table-cell>
          <table:table-cell office:value-type="string" calcext:value-type="string">
            <text:p>そーさりー</text:p>
          </table:table-cell>
          <table:table-cell office:value-type="string" calcext:value-type="string">
            <text:p>第３弾ブースターパック</text:p>
          </table:table-cell>
          <table:table-cell table:formula="of:=VLOOKUP([.G294];[$収録番号.$A$1:$収録番号.$B$9];2;0)" office:value-type="float" office:value="35" calcext:value-type="float">
            <text:p>35</text:p>
          </table:table-cell>
          <table:table-cell office:value-type="string" calcext:value-type="string">
            <text:p>N</text:p>
          </table:table-cell>
          <table:table-cell table:formula="of:=VLOOKUP([.I294];[$レアリティ番号.$A$1:$レアリティ番号.$B$4];2;0)" office:value-type="float" office:value="1" calcext:value-type="float">
            <text:p>1</text:p>
          </table:table-cell>
          <table:table-cell office:value-type="string" calcext:value-type="string">
            <text:p>マホウ</text:p>
          </table:table-cell>
          <table:table-cell table:formula="of:=VLOOKUP([.K294];[$種類番号.$A$1:$種類番号.$B$4];2;0)" office:value-type="float" office:value="3" calcext:value-type="float">
            <text:p>3</text:p>
          </table:table-cell>
          <table:table-cell office:value-type="string" calcext:value-type="string">
            <text:p>緑</text:p>
          </table:table-cell>
          <table:table-cell table:formula="of:=VLOOKUP([.M294];[$色番号.$A$1:$色番号.$B$10];2;0)"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29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4];[$特性番号.$A$1:$特性番号.$B$8];2;0);0)" office:value-type="float" office:value="0" calcext:value-type="float">
            <text:p>0</text:p>
          </table:table-cell>
          <table:table-cell office:value-type="string" calcext:value-type="string">
            <text:p>自分の山札の上から1枚を見て、自分の魔力ゾーンに裏向きのまま置く。そのカードがハイケイかマホウなら、魔力ゾーンに置くかわりに、相手に見せて自分の手札に加えてもよい。</text:p>
          </table:table-cell>
          <table:table-cell table:style-name="ce8" office:value-type="string" calcext:value-type="string">
            <text:p>冥府発動</text:p>
          </table:table-cell>
          <table:table-cell table:formula="of:=IFERROR(VLOOKUP([.$V294];[$遺業能力番号.$A$1:$遺業能力番号.$B$9];2;0);0)" office:value-type="float" office:value="2" calcext:value-type="float">
            <text:p>2</text:p>
          </table:table-cell>
          <table:table-cell office:value-type="string" calcext:value-type="string">
            <text:p>https://one-draw.jp/ijinden/cardlist/003/card/03_065.png</text:p>
          </table:table-cell>
          <table:table-cell table:formula="of:=CONCATENATE([$JSON.$A$1];[.$C294];[$JSON.$B$1];[.$E294];[$JSON.$C$1];[.$F294];[$JSON.$D$1];IF(ISNA([.$S294]);&quot;null&quot;;&quot;&quot;&quot;&quot;&amp;[.$S294]&amp;&quot;&quot;&quot;&quot;);[$JSON.$E$1];[.$U294];[$JSON.$F$1];IF(ISNA([.$V294]);&quot;null&quot;;&quot;&quot;&quot;&quot;&amp;[.$V294]&amp;&quot;&quot;&quot;&quot;);[$JSON.$G$1];[.$X294];[$JSON.$H$1];[.$H294];[$JSON.$I$1];[.J294];[$JSON.$J$1];[.$L294];[$JSON.$K$1];[.$O294];[$JSON.$L$1];[.$N294];[$JSON.$M$1];[.$R294];[$JSON.$N$1];[.$T294];[$JSON.$O$1];[.$W294];[$JSON.$P$1];[.$A294];[$JSON.$Q$1];[.$B294];[$JSON.$R$1])" office:value-type="string" office:string-value="{&quot;id&quot;:&quot;3-65&quot;,&quot;name&quot;:&quot;ソーサリー&quot;,&quot;kana&quot;:&quot;そーさりー&quot;,&quot;traitText&quot;:null,&quot;ruleText&quot;:&quot;自分の山札の上から1枚を見て、自分の魔力ゾーンに裏向きのまま置く。そのカードがハイケイかマホウなら、魔力ゾーンに置くかわりに、相手に見せて自分の手札に加えてもよい。&quot;,&quot;legacyText&quot;:&quot;冥府発動&quot;,&quot;imageUrl&quot;:&quot;https://one-draw.jp/ijinden/cardlist/003/card/03_065.png&quot;,&quot;expansion&quot;:35,&quot;rarity&quot;:1,&quot;type&quot;:3,&quot;level&quot;:5,&quot;color&quot;:4,&quot;term&quot;:0,&quot;trait&quot;:0,&quot;legacy&quot;:2,&quot;orderTable&quot;:293,&quot;orderDeck&quot;:326}," calcext:value-type="string">
            <text:p>{"id":"3-65","name":"ソーサリー","kana":"そーさりー","traitText":null,"ruleText":"自分の山札の上から1枚を見て、自分の魔力ゾーンに裏向きのまま置く。そのカードがハイケイかマホウなら、魔力ゾーンに置くかわりに、相手に見せて自分の手札に加えてもよい。","legacyText":"冥府発動","imageUrl":"https://one-draw.jp/ijinden/cardlist/003/card/03_065.png","expansion":35,"rarity":1,"type":3,"level":5,"color":4,"term":0,"trait":0,"legacy":2,"orderTable":293,"orderDeck":326},</text:p>
          </table:table-cell>
          <table:table-cell table:number-columns-repeated="16347"/>
        </table:table-row>
        <table:table-row table:style-name="ro2">
          <table:table-cell office:value-type="float" office:value="294" calcext:value-type="float">
            <text:p>294</text:p>
          </table:table-cell>
          <table:table-cell office:value-type="float" office:value="298" calcext:value-type="float">
            <text:p>298</text:p>
          </table:table-cell>
          <table:table-cell office:value-type="string" calcext:value-type="string">
            <text:p>3-66</text:p>
          </table:table-cell>
          <table:table-cell office:value-type="float" office:value="66" calcext:value-type="float">
            <text:p>66</text:p>
          </table:table-cell>
          <table:table-cell office:value-type="string" calcext:value-type="string">
            <text:p>クロロオーラ</text:p>
          </table:table-cell>
          <table:table-cell office:value-type="string" calcext:value-type="string">
            <text:p>くろろおーら</text:p>
          </table:table-cell>
          <table:table-cell office:value-type="string" calcext:value-type="string">
            <text:p>第３弾ブースターパック</text:p>
          </table:table-cell>
          <table:table-cell table:formula="of:=VLOOKUP([.G295];[$収録番号.$A$1:$収録番号.$B$9];2;0)" office:value-type="float" office:value="35" calcext:value-type="float">
            <text:p>35</text:p>
          </table:table-cell>
          <table:table-cell office:value-type="string" calcext:value-type="string">
            <text:p>N</text:p>
          </table:table-cell>
          <table:table-cell table:formula="of:=VLOOKUP([.I295];[$レアリティ番号.$A$1:$レアリティ番号.$B$4];2;0)" office:value-type="float" office:value="1" calcext:value-type="float">
            <text:p>1</text:p>
          </table:table-cell>
          <table:table-cell office:value-type="string" calcext:value-type="string">
            <text:p>マホウ</text:p>
          </table:table-cell>
          <table:table-cell table:formula="of:=VLOOKUP([.K295];[$種類番号.$A$1:$種類番号.$B$4];2;0)" office:value-type="float" office:value="3" calcext:value-type="float">
            <text:p>3</text:p>
          </table:table-cell>
          <table:table-cell office:value-type="string" calcext:value-type="string">
            <text:p>緑</text:p>
          </table:table-cell>
          <table:table-cell table:formula="of:=VLOOKUP([.M295];[$色番号.$A$1:$色番号.$B$10];2;0)"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9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5];[$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緑の間「パワー+3000」を得る。</text:p>
          </table:table-cell>
          <table:table-cell table:style-name="ce8" office:value-type="string" calcext:value-type="string">
            <text:p>魔力化</text:p>
          </table:table-cell>
          <table:table-cell table:formula="of:=IFERROR(VLOOKUP([.$V295];[$遺業能力番号.$A$1:$遺業能力番号.$B$9];2;0);0)" office:value-type="float" office:value="1" calcext:value-type="float">
            <text:p>1</text:p>
          </table:table-cell>
          <table:table-cell office:value-type="string" calcext:value-type="string">
            <text:p>https://one-draw.jp/ijinden/cardlist/003/card/03_066.png</text:p>
          </table:table-cell>
          <table:table-cell table:formula="of:=CONCATENATE([$JSON.$A$1];[.$C295];[$JSON.$B$1];[.$E295];[$JSON.$C$1];[.$F295];[$JSON.$D$1];IF(ISNA([.$S295]);&quot;null&quot;;&quot;&quot;&quot;&quot;&amp;[.$S295]&amp;&quot;&quot;&quot;&quot;);[$JSON.$E$1];[.$U295];[$JSON.$F$1];IF(ISNA([.$V295]);&quot;null&quot;;&quot;&quot;&quot;&quot;&amp;[.$V295]&amp;&quot;&quot;&quot;&quot;);[$JSON.$G$1];[.$X295];[$JSON.$H$1];[.$H295];[$JSON.$I$1];[.J295];[$JSON.$J$1];[.$L295];[$JSON.$K$1];[.$O295];[$JSON.$L$1];[.$N295];[$JSON.$M$1];[.$R295];[$JSON.$N$1];[.$T295];[$JSON.$O$1];[.$W295];[$JSON.$P$1];[.$A295];[$JSON.$Q$1];[.$B295];[$JSON.$R$1])" office:value-type="string" office:string-value="{&quot;id&quot;:&quot;3-66&quot;,&quot;name&quot;:&quot;クロロオーラ&quot;,&quot;kana&quot;:&quot;くろろおーら&quot;,&quot;traitText&quot;:null,&quot;ruleText&quot;:&quot;1ドローする。¶マホウ使用によって墓地に置かれる際「冥装」を得た状態で墓地に置かれる。¶装備 : これが緑の間「パワー+3000」を得る。&quot;,&quot;legacyText&quot;:&quot;魔力化&quot;,&quot;imageUrl&quot;:&quot;https://one-draw.jp/ijinden/cardlist/003/card/03_066.png&quot;,&quot;expansion&quot;:35,&quot;rarity&quot;:1,&quot;type&quot;:3,&quot;level&quot;:2,&quot;color&quot;:4,&quot;term&quot;:0,&quot;trait&quot;:0,&quot;legacy&quot;:1,&quot;orderTable&quot;:294,&quot;orderDeck&quot;:298}," calcext:value-type="string">
            <text:p>{"id":"3-66","name":"クロロオーラ","kana":"くろろおーら","traitText":null,"ruleText":"1ドローする。¶マホウ使用によって墓地に置かれる際「冥装」を得た状態で墓地に置かれる。¶装備 : これが緑の間「パワー+3000」を得る。","legacyText":"魔力化","imageUrl":"https://one-draw.jp/ijinden/cardlist/003/card/03_066.png","expansion":35,"rarity":1,"type":3,"level":2,"color":4,"term":0,"trait":0,"legacy":1,"orderTable":294,"orderDeck":298},</text:p>
          </table:table-cell>
          <table:table-cell table:number-columns-repeated="16347"/>
        </table:table-row>
        <table:table-row table:style-name="ro2">
          <table:table-cell office:value-type="float" office:value="295" calcext:value-type="float">
            <text:p>295</text:p>
          </table:table-cell>
          <table:table-cell office:value-type="float" office:value="299" calcext:value-type="float">
            <text:p>299</text:p>
          </table:table-cell>
          <table:table-cell office:value-type="string" calcext:value-type="string">
            <text:p>3-67</text:p>
          </table:table-cell>
          <table:table-cell office:value-type="float" office:value="67" calcext:value-type="float">
            <text:p>67</text:p>
          </table:table-cell>
          <table:table-cell office:value-type="string" calcext:value-type="string">
            <text:p>パシフィック</text:p>
          </table:table-cell>
          <table:table-cell office:value-type="string" calcext:value-type="string">
            <text:p>ぱしふぃっく</text:p>
          </table:table-cell>
          <table:table-cell office:value-type="string" calcext:value-type="string">
            <text:p>第３弾ブースターパック</text:p>
          </table:table-cell>
          <table:table-cell table:formula="of:=VLOOKUP([.G296];[$収録番号.$A$1:$収録番号.$B$9];2;0)" office:value-type="float" office:value="35" calcext:value-type="float">
            <text:p>35</text:p>
          </table:table-cell>
          <table:table-cell office:value-type="string" calcext:value-type="string">
            <text:p>N</text:p>
          </table:table-cell>
          <table:table-cell table:formula="of:=VLOOKUP([.I296];[$レアリティ番号.$A$1:$レアリティ番号.$B$4];2;0)" office:value-type="float" office:value="1" calcext:value-type="float">
            <text:p>1</text:p>
          </table:table-cell>
          <table:table-cell office:value-type="string" calcext:value-type="string">
            <text:p>マホウ</text:p>
          </table:table-cell>
          <table:table-cell table:formula="of:=VLOOKUP([.K296];[$種類番号.$A$1:$種類番号.$B$4];2;0)" office:value-type="float" office:value="3" calcext:value-type="float">
            <text:p>3</text:p>
          </table:table-cell>
          <table:table-cell office:value-type="string" calcext:value-type="string">
            <text:p>黄</text:p>
          </table:table-cell>
          <table:table-cell table:formula="of:=VLOOKUP([.M296];[$色番号.$A$1:$色番号.$B$10];2;0)" office:value-type="float" office:value="8" calcext:value-type="float">
            <text:p>8</text:p>
          </table:table-cell>
          <table:table-cell office:value-type="float" office:value="2" calcext:value-type="float">
            <text:p>2</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29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6];[$特性番号.$A$1:$特性番号.$B$8];2;0);0)" office:value-type="float" office:value="0" calcext:value-type="float">
            <text:p>0</text:p>
          </table:table-cell>
          <table:table-cell office:value-type="string" calcext:value-type="string">
            <text:p>『プレッシャー』能力を持つイジン1体を指定して発動できる。そのイジンがアタッカーなら、そのイジンを山札の下に戻す。そうでなければ、そのイジンを寝かせる。</text:p>
          </table:table-cell>
          <table:table-cell table:style-name="ce8" office:value-type="string" calcext:value-type="string">
            <text:p>冥府発動</text:p>
          </table:table-cell>
          <table:table-cell table:formula="of:=IFERROR(VLOOKUP([.$V296];[$遺業能力番号.$A$1:$遺業能力番号.$B$9];2;0);0)" office:value-type="float" office:value="2" calcext:value-type="float">
            <text:p>2</text:p>
          </table:table-cell>
          <table:table-cell office:value-type="string" calcext:value-type="string">
            <text:p>https://one-draw.jp/ijinden/cardlist/003/card/03_067.png</text:p>
          </table:table-cell>
          <table:table-cell table:formula="of:=CONCATENATE([$JSON.$A$1];[.$C296];[$JSON.$B$1];[.$E296];[$JSON.$C$1];[.$F296];[$JSON.$D$1];IF(ISNA([.$S296]);&quot;null&quot;;&quot;&quot;&quot;&quot;&amp;[.$S296]&amp;&quot;&quot;&quot;&quot;);[$JSON.$E$1];[.$U296];[$JSON.$F$1];IF(ISNA([.$V296]);&quot;null&quot;;&quot;&quot;&quot;&quot;&amp;[.$V296]&amp;&quot;&quot;&quot;&quot;);[$JSON.$G$1];[.$X296];[$JSON.$H$1];[.$H296];[$JSON.$I$1];[.J296];[$JSON.$J$1];[.$L296];[$JSON.$K$1];[.$O296];[$JSON.$L$1];[.$N296];[$JSON.$M$1];[.$R296];[$JSON.$N$1];[.$T296];[$JSON.$O$1];[.$W296];[$JSON.$P$1];[.$A296];[$JSON.$Q$1];[.$B296];[$JSON.$R$1])" office:value-type="string" office:string-value="{&quot;id&quot;:&quot;3-67&quot;,&quot;name&quot;:&quot;パシフィック&quot;,&quot;kana&quot;:&quot;ぱしふぃっく&quot;,&quot;traitText&quot;:null,&quot;ruleText&quot;:&quot;『プレッシャー』能力を持つイジン1体を指定して発動できる。そのイジンがアタッカーなら、そのイジンを山札の下に戻す。そうでなければ、そのイジンを寝かせる。&quot;,&quot;legacyText&quot;:&quot;冥府発動&quot;,&quot;imageUrl&quot;:&quot;https://one-draw.jp/ijinden/cardlist/003/card/03_067.png&quot;,&quot;expansion&quot;:35,&quot;rarity&quot;:1,&quot;type&quot;:3,&quot;level&quot;:2,&quot;color&quot;:8,&quot;term&quot;:0,&quot;trait&quot;:0,&quot;legacy&quot;:2,&quot;orderTable&quot;:295,&quot;orderDeck&quot;:299}," calcext:value-type="string">
            <text:p>{"id":"3-67","name":"パシフィック","kana":"ぱしふぃっく","traitText":null,"ruleText":"『プレッシャー』能力を持つイジン1体を指定して発動できる。そのイジンがアタッカーなら、そのイジンを山札の下に戻す。そうでなければ、そのイジンを寝かせる。","legacyText":"冥府発動","imageUrl":"https://one-draw.jp/ijinden/cardlist/003/card/03_067.png","expansion":35,"rarity":1,"type":3,"level":2,"color":8,"term":0,"trait":0,"legacy":2,"orderTable":295,"orderDeck":299},</text:p>
          </table:table-cell>
          <table:table-cell table:number-columns-repeated="16347"/>
        </table:table-row>
        <table:table-row table:style-name="ro2">
          <table:table-cell office:value-type="float" office:value="296" calcext:value-type="float">
            <text:p>296</text:p>
          </table:table-cell>
          <table:table-cell office:value-type="float" office:value="301" calcext:value-type="float">
            <text:p>301</text:p>
          </table:table-cell>
          <table:table-cell office:value-type="string" calcext:value-type="string">
            <text:p>3-68</text:p>
          </table:table-cell>
          <table:table-cell office:value-type="float" office:value="68" calcext:value-type="float">
            <text:p>68</text:p>
          </table:table-cell>
          <table:table-cell office:value-type="string" calcext:value-type="string">
            <text:p>ジオオーラ</text:p>
          </table:table-cell>
          <table:table-cell office:value-type="string" calcext:value-type="string">
            <text:p>じおおーら</text:p>
          </table:table-cell>
          <table:table-cell office:value-type="string" calcext:value-type="string">
            <text:p>第３弾ブースターパック</text:p>
          </table:table-cell>
          <table:table-cell table:formula="of:=VLOOKUP([.G297];[$収録番号.$A$1:$収録番号.$B$9];2;0)" office:value-type="float" office:value="35" calcext:value-type="float">
            <text:p>35</text:p>
          </table:table-cell>
          <table:table-cell office:value-type="string" calcext:value-type="string">
            <text:p>R</text:p>
          </table:table-cell>
          <table:table-cell table:formula="of:=VLOOKUP([.I297];[$レアリティ番号.$A$1:$レアリティ番号.$B$4];2;0)" office:value-type="float" office:value="2" calcext:value-type="float">
            <text:p>2</text:p>
          </table:table-cell>
          <table:table-cell office:value-type="string" calcext:value-type="string">
            <text:p>マホウ</text:p>
          </table:table-cell>
          <table:table-cell table:formula="of:=VLOOKUP([.K297];[$種類番号.$A$1:$種類番号.$B$4];2;0)" office:value-type="float" office:value="3" calcext:value-type="float">
            <text:p>3</text:p>
          </table:table-cell>
          <table:table-cell office:value-type="string" calcext:value-type="string">
            <text:p>黄</text:p>
          </table:table-cell>
          <table:table-cell table:formula="of:=VLOOKUP([.M297];[$色番号.$A$1:$色番号.$B$10];2;0)"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9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7];[$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黄の間「ウォッチャー ブロック+2000」を得る。</text:p>
          </table:table-cell>
          <table:table-cell table:style-name="ce8" office:value-type="string" calcext:value-type="string">
            <text:p>魔力化</text:p>
          </table:table-cell>
          <table:table-cell table:formula="of:=IFERROR(VLOOKUP([.$V297];[$遺業能力番号.$A$1:$遺業能力番号.$B$9];2;0);0)" office:value-type="float" office:value="1" calcext:value-type="float">
            <text:p>1</text:p>
          </table:table-cell>
          <table:table-cell office:value-type="string" calcext:value-type="string">
            <text:p>https://one-draw.jp/ijinden/cardlist/003/card/03_068.png</text:p>
          </table:table-cell>
          <table:table-cell table:formula="of:=CONCATENATE([$JSON.$A$1];[.$C297];[$JSON.$B$1];[.$E297];[$JSON.$C$1];[.$F297];[$JSON.$D$1];IF(ISNA([.$S297]);&quot;null&quot;;&quot;&quot;&quot;&quot;&amp;[.$S297]&amp;&quot;&quot;&quot;&quot;);[$JSON.$E$1];[.$U297];[$JSON.$F$1];IF(ISNA([.$V297]);&quot;null&quot;;&quot;&quot;&quot;&quot;&amp;[.$V297]&amp;&quot;&quot;&quot;&quot;);[$JSON.$G$1];[.$X297];[$JSON.$H$1];[.$H297];[$JSON.$I$1];[.J297];[$JSON.$J$1];[.$L297];[$JSON.$K$1];[.$O297];[$JSON.$L$1];[.$N297];[$JSON.$M$1];[.$R297];[$JSON.$N$1];[.$T297];[$JSON.$O$1];[.$W297];[$JSON.$P$1];[.$A297];[$JSON.$Q$1];[.$B297];[$JSON.$R$1])" office:value-type="string" office:string-value="{&quot;id&quot;:&quot;3-68&quot;,&quot;name&quot;:&quot;ジオオーラ&quot;,&quot;kana&quot;:&quot;じおおーら&quot;,&quot;traitText&quot;:null,&quot;ruleText&quot;:&quot;1ドローする。¶マホウ使用によって墓地に置かれる際「冥装」を得た状態で墓地に置かれる。¶装備 : これが黄の間「ウォッチャー ブロック+2000」を得る。&quot;,&quot;legacyText&quot;:&quot;魔力化&quot;,&quot;imageUrl&quot;:&quot;https://one-draw.jp/ijinden/cardlist/003/card/03_068.png&quot;,&quot;expansion&quot;:35,&quot;rarity&quot;:2,&quot;type&quot;:3,&quot;level&quot;:2,&quot;color&quot;:8,&quot;term&quot;:0,&quot;trait&quot;:0,&quot;legacy&quot;:1,&quot;orderTable&quot;:296,&quot;orderDeck&quot;:301}," calcext:value-type="string">
            <text:p>{"id":"3-68","name":"ジオオーラ","kana":"じおおーら","traitText":null,"ruleText":"1ドローする。¶マホウ使用によって墓地に置かれる際「冥装」を得た状態で墓地に置かれる。¶装備 : これが黄の間「ウォッチャー ブロック+2000」を得る。","legacyText":"魔力化","imageUrl":"https://one-draw.jp/ijinden/cardlist/003/card/03_068.png","expansion":35,"rarity":2,"type":3,"level":2,"color":8,"term":0,"trait":0,"legacy":1,"orderTable":296,"orderDeck":301},</text:p>
          </table:table-cell>
          <table:table-cell table:number-columns-repeated="16347"/>
        </table:table-row>
        <table:table-row table:style-name="ro2">
          <table:table-cell office:value-type="float" office:value="297" calcext:value-type="float">
            <text:p>297</text:p>
          </table:table-cell>
          <table:table-cell office:value-type="float" office:value="317" calcext:value-type="float">
            <text:p>317</text:p>
          </table:table-cell>
          <table:table-cell office:value-type="string" calcext:value-type="string">
            <text:p>3-69</text:p>
          </table:table-cell>
          <table:table-cell office:value-type="float" office:value="69" calcext:value-type="float">
            <text:p>69</text:p>
          </table:table-cell>
          <table:table-cell office:value-type="string" calcext:value-type="string">
            <text:p>コーザリティ</text:p>
          </table:table-cell>
          <table:table-cell office:value-type="string" calcext:value-type="string">
            <text:p>こーざりてぃ</text:p>
          </table:table-cell>
          <table:table-cell office:value-type="string" calcext:value-type="string">
            <text:p>第３弾ブースターパック</text:p>
          </table:table-cell>
          <table:table-cell table:formula="of:=VLOOKUP([.G298];[$収録番号.$A$1:$収録番号.$B$9];2;0)" office:value-type="float" office:value="35" calcext:value-type="float">
            <text:p>35</text:p>
          </table:table-cell>
          <table:table-cell office:value-type="string" calcext:value-type="string">
            <text:p>N</text:p>
          </table:table-cell>
          <table:table-cell table:formula="of:=VLOOKUP([.I298];[$レアリティ番号.$A$1:$レアリティ番号.$B$4];2;0)" office:value-type="float" office:value="1" calcext:value-type="float">
            <text:p>1</text:p>
          </table:table-cell>
          <table:table-cell office:value-type="string" calcext:value-type="string">
            <text:p>マホウ</text:p>
          </table:table-cell>
          <table:table-cell table:formula="of:=VLOOKUP([.K298];[$種類番号.$A$1:$種類番号.$B$4];2;0)" office:value-type="float" office:value="3" calcext:value-type="float">
            <text:p>3</text:p>
          </table:table-cell>
          <table:table-cell office:value-type="string" calcext:value-type="string">
            <text:p>紫</text:p>
          </table:table-cell>
          <table:table-cell table:formula="of:=VLOOKUP([.M298];[$色番号.$A$1:$色番号.$B$10];2;0)" office:value-type="float" office:value="16" calcext:value-type="float">
            <text:p>16</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29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8];[$特性番号.$A$1:$特性番号.$B$8];2;0);0)" office:value-type="float" office:value="0" calcext:value-type="float">
            <text:p>0</text:p>
          </table:table-cell>
          <table:table-cell office:value-type="string" calcext:value-type="string">
            <text:p>「自分の山札の上から2枚を墓地に置く」か「相手の山札の上から2枚を墓地に置く」を発揮して、墓地のイジン1体を手札に戻す。</text:p>
          </table:table-cell>
          <table:table-cell table:style-name="ce8" office:value-type="string" calcext:value-type="string">
            <text:p>冥府発動</text:p>
          </table:table-cell>
          <table:table-cell table:formula="of:=IFERROR(VLOOKUP([.$V298];[$遺業能力番号.$A$1:$遺業能力番号.$B$9];2;0);0)" office:value-type="float" office:value="2" calcext:value-type="float">
            <text:p>2</text:p>
          </table:table-cell>
          <table:table-cell office:value-type="string" calcext:value-type="string">
            <text:p>https://one-draw.jp/ijinden/cardlist/003/card/03_069.png</text:p>
          </table:table-cell>
          <table:table-cell table:formula="of:=CONCATENATE([$JSON.$A$1];[.$C298];[$JSON.$B$1];[.$E298];[$JSON.$C$1];[.$F298];[$JSON.$D$1];IF(ISNA([.$S298]);&quot;null&quot;;&quot;&quot;&quot;&quot;&amp;[.$S298]&amp;&quot;&quot;&quot;&quot;);[$JSON.$E$1];[.$U298];[$JSON.$F$1];IF(ISNA([.$V298]);&quot;null&quot;;&quot;&quot;&quot;&quot;&amp;[.$V298]&amp;&quot;&quot;&quot;&quot;);[$JSON.$G$1];[.$X298];[$JSON.$H$1];[.$H298];[$JSON.$I$1];[.J298];[$JSON.$J$1];[.$L298];[$JSON.$K$1];[.$O298];[$JSON.$L$1];[.$N298];[$JSON.$M$1];[.$R298];[$JSON.$N$1];[.$T298];[$JSON.$O$1];[.$W298];[$JSON.$P$1];[.$A298];[$JSON.$Q$1];[.$B298];[$JSON.$R$1])" office:value-type="string" office:string-value="{&quot;id&quot;:&quot;3-69&quot;,&quot;name&quot;:&quot;コーザリティ&quot;,&quot;kana&quot;:&quot;こーざりてぃ&quot;,&quot;traitText&quot;:null,&quot;ruleText&quot;:&quot;「自分の山札の上から2枚を墓地に置く」か「相手の山札の上から2枚を墓地に置く」を発揮して、墓地のイジン1体を手札に戻す。&quot;,&quot;legacyText&quot;:&quot;冥府発動&quot;,&quot;imageUrl&quot;:&quot;https://one-draw.jp/ijinden/cardlist/003/card/03_069.png&quot;,&quot;expansion&quot;:35,&quot;rarity&quot;:1,&quot;type&quot;:3,&quot;level&quot;:3,&quot;color&quot;:16,&quot;term&quot;:0,&quot;trait&quot;:0,&quot;legacy&quot;:2,&quot;orderTable&quot;:297,&quot;orderDeck&quot;:317}," calcext:value-type="string">
            <text:p>{"id":"3-69","name":"コーザリティ","kana":"こーざりてぃ","traitText":null,"ruleText":"「自分の山札の上から2枚を墓地に置く」か「相手の山札の上から2枚を墓地に置く」を発揮して、墓地のイジン1体を手札に戻す。","legacyText":"冥府発動","imageUrl":"https://one-draw.jp/ijinden/cardlist/003/card/03_069.png","expansion":35,"rarity":1,"type":3,"level":3,"color":16,"term":0,"trait":0,"legacy":2,"orderTable":297,"orderDeck":317},</text:p>
          </table:table-cell>
          <table:table-cell table:number-columns-repeated="16347"/>
        </table:table-row>
        <table:table-row table:style-name="ro2">
          <table:table-cell office:value-type="float" office:value="298" calcext:value-type="float">
            <text:p>298</text:p>
          </table:table-cell>
          <table:table-cell office:value-type="float" office:value="302" calcext:value-type="float">
            <text:p>302</text:p>
          </table:table-cell>
          <table:table-cell office:value-type="string" calcext:value-type="string">
            <text:p>3-70</text:p>
          </table:table-cell>
          <table:table-cell office:value-type="float" office:value="70" calcext:value-type="float">
            <text:p>70</text:p>
          </table:table-cell>
          <table:table-cell office:value-type="string" calcext:value-type="string">
            <text:p>エアロオーラ</text:p>
          </table:table-cell>
          <table:table-cell office:value-type="string" calcext:value-type="string">
            <text:p>えあろおーら</text:p>
          </table:table-cell>
          <table:table-cell office:value-type="string" calcext:value-type="string">
            <text:p>第３弾ブースターパック</text:p>
          </table:table-cell>
          <table:table-cell table:formula="of:=VLOOKUP([.G299];[$収録番号.$A$1:$収録番号.$B$9];2;0)" office:value-type="float" office:value="35" calcext:value-type="float">
            <text:p>35</text:p>
          </table:table-cell>
          <table:table-cell office:value-type="string" calcext:value-type="string">
            <text:p>R</text:p>
          </table:table-cell>
          <table:table-cell table:formula="of:=VLOOKUP([.I299];[$レアリティ番号.$A$1:$レアリティ番号.$B$4];2;0)" office:value-type="float" office:value="2" calcext:value-type="float">
            <text:p>2</text:p>
          </table:table-cell>
          <table:table-cell office:value-type="string" calcext:value-type="string">
            <text:p>マホウ</text:p>
          </table:table-cell>
          <table:table-cell table:formula="of:=VLOOKUP([.K299];[$種類番号.$A$1:$種類番号.$B$4];2;0)" office:value-type="float" office:value="3" calcext:value-type="float">
            <text:p>3</text:p>
          </table:table-cell>
          <table:table-cell office:value-type="string" calcext:value-type="string">
            <text:p>紫</text:p>
          </table:table-cell>
          <table:table-cell table:formula="of:=VLOOKUP([.M299];[$色番号.$A$1:$色番号.$B$10];2;0)" office:value-type="float" office:value="16" calcext:value-type="float">
            <text:p>16</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9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9];[$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紫の間「ダブルプレッシャー アタック+2000」を得る。</text:p>
          </table:table-cell>
          <table:table-cell table:style-name="ce8" office:value-type="string" calcext:value-type="string">
            <text:p>魔力化</text:p>
          </table:table-cell>
          <table:table-cell table:formula="of:=IFERROR(VLOOKUP([.$V299];[$遺業能力番号.$A$1:$遺業能力番号.$B$9];2;0);0)" office:value-type="float" office:value="1" calcext:value-type="float">
            <text:p>1</text:p>
          </table:table-cell>
          <table:table-cell office:value-type="string" calcext:value-type="string">
            <text:p>https://one-draw.jp/ijinden/cardlist/003/card/03_070.png</text:p>
          </table:table-cell>
          <table:table-cell table:formula="of:=CONCATENATE([$JSON.$A$1];[.$C299];[$JSON.$B$1];[.$E299];[$JSON.$C$1];[.$F299];[$JSON.$D$1];IF(ISNA([.$S299]);&quot;null&quot;;&quot;&quot;&quot;&quot;&amp;[.$S299]&amp;&quot;&quot;&quot;&quot;);[$JSON.$E$1];[.$U299];[$JSON.$F$1];IF(ISNA([.$V299]);&quot;null&quot;;&quot;&quot;&quot;&quot;&amp;[.$V299]&amp;&quot;&quot;&quot;&quot;);[$JSON.$G$1];[.$X299];[$JSON.$H$1];[.$H299];[$JSON.$I$1];[.J299];[$JSON.$J$1];[.$L299];[$JSON.$K$1];[.$O299];[$JSON.$L$1];[.$N299];[$JSON.$M$1];[.$R299];[$JSON.$N$1];[.$T299];[$JSON.$O$1];[.$W299];[$JSON.$P$1];[.$A299];[$JSON.$Q$1];[.$B299];[$JSON.$R$1])" office:value-type="string" office:string-value="{&quot;id&quot;:&quot;3-70&quot;,&quot;name&quot;:&quot;エアロオーラ&quot;,&quot;kana&quot;:&quot;えあろおーら&quot;,&quot;traitText&quot;:null,&quot;ruleText&quot;:&quot;1ドローする。¶マホウ使用によって墓地に置かれる際「冥装」を得た状態で墓地に置かれる。¶装備 : これが紫の間「ダブルプレッシャー アタック+2000」を得る。&quot;,&quot;legacyText&quot;:&quot;魔力化&quot;,&quot;imageUrl&quot;:&quot;https://one-draw.jp/ijinden/cardlist/003/card/03_070.png&quot;,&quot;expansion&quot;:35,&quot;rarity&quot;:2,&quot;type&quot;:3,&quot;level&quot;:2,&quot;color&quot;:16,&quot;term&quot;:0,&quot;trait&quot;:0,&quot;legacy&quot;:1,&quot;orderTable&quot;:298,&quot;orderDeck&quot;:302}," calcext:value-type="string">
            <text:p>{"id":"3-70","name":"エアロオーラ","kana":"えあろおーら","traitText":null,"ruleText":"1ドローする。¶マホウ使用によって墓地に置かれる際「冥装」を得た状態で墓地に置かれる。¶装備 : これが紫の間「ダブルプレッシャー アタック+2000」を得る。","legacyText":"魔力化","imageUrl":"https://one-draw.jp/ijinden/cardlist/003/card/03_070.png","expansion":35,"rarity":2,"type":3,"level":2,"color":16,"term":0,"trait":0,"legacy":1,"orderTable":298,"orderDeck":302},</text:p>
          </table:table-cell>
          <table:table-cell table:number-columns-repeated="16347"/>
        </table:table-row>
        <table:table-row table:style-name="ro2">
          <table:table-cell office:value-type="float" office:value="299" calcext:value-type="float">
            <text:p>299</text:p>
          </table:table-cell>
          <table:table-cell office:value-type="float" office:value="347" calcext:value-type="float">
            <text:p>347</text:p>
          </table:table-cell>
          <table:table-cell office:value-type="string" calcext:value-type="string">
            <text:p>3-71</text:p>
          </table:table-cell>
          <table:table-cell office:value-type="float" office:value="71" calcext:value-type="float">
            <text:p>71</text:p>
          </table:table-cell>
          <table:table-cell office:value-type="string" calcext:value-type="string">
            <text:p>喜びの種</text:p>
          </table:table-cell>
          <table:table-cell office:value-type="string" calcext:value-type="string">
            <text:p>よろこびのたね</text:p>
          </table:table-cell>
          <table:table-cell office:value-type="string" calcext:value-type="string">
            <text:p>第３弾ブースターパック</text:p>
          </table:table-cell>
          <table:table-cell table:formula="of:=VLOOKUP([.G300];[$収録番号.$A$1:$収録番号.$B$9];2;0)" office:value-type="float" office:value="35" calcext:value-type="float">
            <text:p>35</text:p>
          </table:table-cell>
          <table:table-cell office:value-type="string" calcext:value-type="string">
            <text:p>N</text:p>
          </table:table-cell>
          <table:table-cell table:formula="of:=VLOOKUP([.I300];[$レアリティ番号.$A$1:$レアリティ番号.$B$4];2;0)" office:value-type="float" office:value="1" calcext:value-type="float">
            <text:p>1</text:p>
          </table:table-cell>
          <table:table-cell office:value-type="string" calcext:value-type="string">
            <text:p>マリョク</text:p>
          </table:table-cell>
          <table:table-cell table:formula="of:=VLOOKUP([.K300];[$種類番号.$A$1:$種類番号.$B$4];2;0)" office:value-type="float" office:value="4" calcext:value-type="float">
            <text:p>4</text:p>
          </table:table-cell>
          <table:table-cell office:value-type="string" calcext:value-type="string">
            <text:p>赤</text:p>
          </table:table-cell>
          <table:table-cell table:formula="of:=VLOOKUP([.M300];[$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0];[$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V300];[$遺業能力番号.$A$1:$遺業能力番号.$B$9];2;0);0)" office:value-type="float" office:value="1" calcext:value-type="float">
            <text:p>1</text:p>
          </table:table-cell>
          <table:table-cell office:value-type="string" calcext:value-type="string">
            <text:p>https://one-draw.jp/ijinden/cardlist/003/card/03_071.png</text:p>
          </table:table-cell>
          <table:table-cell table:formula="of:=CONCATENATE([$JSON.$A$1];[.$C300];[$JSON.$B$1];[.$E300];[$JSON.$C$1];[.$F300];[$JSON.$D$1];IF(ISNA([.$S300]);&quot;null&quot;;&quot;&quot;&quot;&quot;&amp;[.$S300]&amp;&quot;&quot;&quot;&quot;);[$JSON.$E$1];[.$U300];[$JSON.$F$1];IF(ISNA([.$V300]);&quot;null&quot;;&quot;&quot;&quot;&quot;&amp;[.$V300]&amp;&quot;&quot;&quot;&quot;);[$JSON.$G$1];[.$X300];[$JSON.$H$1];[.$H300];[$JSON.$I$1];[.J300];[$JSON.$J$1];[.$L300];[$JSON.$K$1];[.$O300];[$JSON.$L$1];[.$N300];[$JSON.$M$1];[.$R300];[$JSON.$N$1];[.$T300];[$JSON.$O$1];[.$W300];[$JSON.$P$1];[.$A300];[$JSON.$Q$1];[.$B300];[$JSON.$R$1])" office:value-type="string" office:string-value="{&quot;id&quot;:&quot;3-71&quot;,&quot;name&quot;:&quot;喜びの種&quot;,&quot;kana&quot;:&quot;よろこびのたね&quot;,&quot;traitText&quot;:null,&quot;ruleText&quot;:&quot;魔力ゾーンに置かれたとき、自分の山札の上から1枚を裏のまま魔力ゾーンに置く。&quot;,&quot;legacyText&quot;:&quot;魔力化&quot;,&quot;imageUrl&quot;:&quot;https://one-draw.jp/ijinden/cardlist/003/card/03_071.png&quot;,&quot;expansion&quot;:35,&quot;rarity&quot;:1,&quot;type&quot;:4,&quot;level&quot;:1,&quot;color&quot;:1,&quot;term&quot;:0,&quot;trait&quot;:0,&quot;legacy&quot;:1,&quot;orderTable&quot;:299,&quot;orderDeck&quot;:347}," calcext:value-type="string">
            <text:p>{"id":"3-71","name":"喜びの種","kana":"よろこびのたね","traitText":null,"ruleText":"魔力ゾーンに置かれたとき、自分の山札の上から1枚を裏のまま魔力ゾーンに置く。","legacyText":"魔力化","imageUrl":"https://one-draw.jp/ijinden/cardlist/003/card/03_071.png","expansion":35,"rarity":1,"type":4,"level":1,"color":1,"term":0,"trait":0,"legacy":1,"orderTable":299,"orderDeck":347},</text:p>
          </table:table-cell>
          <table:table-cell table:number-columns-repeated="16347"/>
        </table:table-row>
        <table:table-row table:style-name="ro2">
          <table:table-cell office:value-type="float" office:value="300" calcext:value-type="float">
            <text:p>300</text:p>
          </table:table-cell>
          <table:table-cell office:value-type="float" office:value="353" calcext:value-type="float">
            <text:p>353</text:p>
          </table:table-cell>
          <table:table-cell office:value-type="string" calcext:value-type="string">
            <text:p>3-72</text:p>
          </table:table-cell>
          <table:table-cell office:value-type="float" office:value="72" calcext:value-type="float">
            <text:p>72</text:p>
          </table:table-cell>
          <table:table-cell office:value-type="string" calcext:value-type="string">
            <text:p>怖れの種</text:p>
          </table:table-cell>
          <table:table-cell office:value-type="string" calcext:value-type="string">
            <text:p>おそれのたね</text:p>
          </table:table-cell>
          <table:table-cell office:value-type="string" calcext:value-type="string">
            <text:p>第３弾ブースターパック</text:p>
          </table:table-cell>
          <table:table-cell table:formula="of:=VLOOKUP([.G301];[$収録番号.$A$1:$収録番号.$B$9];2;0)" office:value-type="float" office:value="35" calcext:value-type="float">
            <text:p>35</text:p>
          </table:table-cell>
          <table:table-cell office:value-type="string" calcext:value-type="string">
            <text:p>N</text:p>
          </table:table-cell>
          <table:table-cell table:formula="of:=VLOOKUP([.I301];[$レアリティ番号.$A$1:$レアリティ番号.$B$4];2;0)" office:value-type="float" office:value="1" calcext:value-type="float">
            <text:p>1</text:p>
          </table:table-cell>
          <table:table-cell office:value-type="string" calcext:value-type="string">
            <text:p>マリョク</text:p>
          </table:table-cell>
          <table:table-cell table:formula="of:=VLOOKUP([.K301];[$種類番号.$A$1:$種類番号.$B$4];2;0)" office:value-type="float" office:value="4" calcext:value-type="float">
            <text:p>4</text:p>
          </table:table-cell>
          <table:table-cell office:value-type="string" calcext:value-type="string">
            <text:p>青</text:p>
          </table:table-cell>
          <table:table-cell table:formula="of:=VLOOKUP([.M301];[$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1];[$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V301];[$遺業能力番号.$A$1:$遺業能力番号.$B$9];2;0);0)" office:value-type="float" office:value="1" calcext:value-type="float">
            <text:p>1</text:p>
          </table:table-cell>
          <table:table-cell office:value-type="string" calcext:value-type="string">
            <text:p>https://one-draw.jp/ijinden/cardlist/003/card/03_072.png</text:p>
          </table:table-cell>
          <table:table-cell table:formula="of:=CONCATENATE([$JSON.$A$1];[.$C301];[$JSON.$B$1];[.$E301];[$JSON.$C$1];[.$F301];[$JSON.$D$1];IF(ISNA([.$S301]);&quot;null&quot;;&quot;&quot;&quot;&quot;&amp;[.$S301]&amp;&quot;&quot;&quot;&quot;);[$JSON.$E$1];[.$U301];[$JSON.$F$1];IF(ISNA([.$V301]);&quot;null&quot;;&quot;&quot;&quot;&quot;&amp;[.$V301]&amp;&quot;&quot;&quot;&quot;);[$JSON.$G$1];[.$X301];[$JSON.$H$1];[.$H301];[$JSON.$I$1];[.J301];[$JSON.$J$1];[.$L301];[$JSON.$K$1];[.$O301];[$JSON.$L$1];[.$N301];[$JSON.$M$1];[.$R301];[$JSON.$N$1];[.$T301];[$JSON.$O$1];[.$W301];[$JSON.$P$1];[.$A301];[$JSON.$Q$1];[.$B301];[$JSON.$R$1])" office:value-type="string" office:string-value="{&quot;id&quot;:&quot;3-72&quot;,&quot;name&quot;:&quot;怖れの種&quot;,&quot;kana&quot;:&quot;おそれのたね&quot;,&quot;traitText&quot;:null,&quot;ruleText&quot;:&quot;魔力ゾーンに置かれたとき、自分の山札の上から1枚を裏のまま魔力ゾーンに置く。&quot;,&quot;legacyText&quot;:&quot;魔力化&quot;,&quot;imageUrl&quot;:&quot;https://one-draw.jp/ijinden/cardlist/003/card/03_072.png&quot;,&quot;expansion&quot;:35,&quot;rarity&quot;:1,&quot;type&quot;:4,&quot;level&quot;:1,&quot;color&quot;:2,&quot;term&quot;:0,&quot;trait&quot;:0,&quot;legacy&quot;:1,&quot;orderTable&quot;:300,&quot;orderDeck&quot;:353}," calcext:value-type="string">
            <text:p>{"id":"3-72","name":"怖れの種","kana":"おそれのたね","traitText":null,"ruleText":"魔力ゾーンに置かれたとき、自分の山札の上から1枚を裏のまま魔力ゾーンに置く。","legacyText":"魔力化","imageUrl":"https://one-draw.jp/ijinden/cardlist/003/card/03_072.png","expansion":35,"rarity":1,"type":4,"level":1,"color":2,"term":0,"trait":0,"legacy":1,"orderTable":300,"orderDeck":353},</text:p>
          </table:table-cell>
          <table:table-cell table:number-columns-repeated="16347"/>
        </table:table-row>
        <table:table-row table:style-name="ro2">
          <table:table-cell office:value-type="float" office:value="301" calcext:value-type="float">
            <text:p>301</text:p>
          </table:table-cell>
          <table:table-cell office:value-type="float" office:value="359" calcext:value-type="float">
            <text:p>359</text:p>
          </table:table-cell>
          <table:table-cell office:value-type="string" calcext:value-type="string">
            <text:p>3-73</text:p>
          </table:table-cell>
          <table:table-cell office:value-type="float" office:value="73" calcext:value-type="float">
            <text:p>73</text:p>
          </table:table-cell>
          <table:table-cell office:value-type="string" calcext:value-type="string">
            <text:p>怒りの種</text:p>
          </table:table-cell>
          <table:table-cell office:value-type="string" calcext:value-type="string">
            <text:p>いかりのたね</text:p>
          </table:table-cell>
          <table:table-cell office:value-type="string" calcext:value-type="string">
            <text:p>第３弾ブースターパック</text:p>
          </table:table-cell>
          <table:table-cell table:formula="of:=VLOOKUP([.G302];[$収録番号.$A$1:$収録番号.$B$9];2;0)" office:value-type="float" office:value="35" calcext:value-type="float">
            <text:p>35</text:p>
          </table:table-cell>
          <table:table-cell office:value-type="string" calcext:value-type="string">
            <text:p>N</text:p>
          </table:table-cell>
          <table:table-cell table:formula="of:=VLOOKUP([.I302];[$レアリティ番号.$A$1:$レアリティ番号.$B$4];2;0)" office:value-type="float" office:value="1" calcext:value-type="float">
            <text:p>1</text:p>
          </table:table-cell>
          <table:table-cell office:value-type="string" calcext:value-type="string">
            <text:p>マリョク</text:p>
          </table:table-cell>
          <table:table-cell table:formula="of:=VLOOKUP([.K302];[$種類番号.$A$1:$種類番号.$B$4];2;0)" office:value-type="float" office:value="4" calcext:value-type="float">
            <text:p>4</text:p>
          </table:table-cell>
          <table:table-cell office:value-type="string" calcext:value-type="string">
            <text:p>緑</text:p>
          </table:table-cell>
          <table:table-cell table:formula="of:=VLOOKUP([.M302];[$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2];[$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V302];[$遺業能力番号.$A$1:$遺業能力番号.$B$9];2;0);0)" office:value-type="float" office:value="1" calcext:value-type="float">
            <text:p>1</text:p>
          </table:table-cell>
          <table:table-cell office:value-type="string" calcext:value-type="string">
            <text:p>https://one-draw.jp/ijinden/cardlist/003/card/03_073.png</text:p>
          </table:table-cell>
          <table:table-cell table:formula="of:=CONCATENATE([$JSON.$A$1];[.$C302];[$JSON.$B$1];[.$E302];[$JSON.$C$1];[.$F302];[$JSON.$D$1];IF(ISNA([.$S302]);&quot;null&quot;;&quot;&quot;&quot;&quot;&amp;[.$S302]&amp;&quot;&quot;&quot;&quot;);[$JSON.$E$1];[.$U302];[$JSON.$F$1];IF(ISNA([.$V302]);&quot;null&quot;;&quot;&quot;&quot;&quot;&amp;[.$V302]&amp;&quot;&quot;&quot;&quot;);[$JSON.$G$1];[.$X302];[$JSON.$H$1];[.$H302];[$JSON.$I$1];[.J302];[$JSON.$J$1];[.$L302];[$JSON.$K$1];[.$O302];[$JSON.$L$1];[.$N302];[$JSON.$M$1];[.$R302];[$JSON.$N$1];[.$T302];[$JSON.$O$1];[.$W302];[$JSON.$P$1];[.$A302];[$JSON.$Q$1];[.$B302];[$JSON.$R$1])" office:value-type="string" office:string-value="{&quot;id&quot;:&quot;3-73&quot;,&quot;name&quot;:&quot;怒りの種&quot;,&quot;kana&quot;:&quot;いかりのたね&quot;,&quot;traitText&quot;:null,&quot;ruleText&quot;:&quot;魔力ゾーンに置かれたとき、自分の山札の上から1枚を裏のまま魔力ゾーンに置く。&quot;,&quot;legacyText&quot;:&quot;魔力化&quot;,&quot;imageUrl&quot;:&quot;https://one-draw.jp/ijinden/cardlist/003/card/03_073.png&quot;,&quot;expansion&quot;:35,&quot;rarity&quot;:1,&quot;type&quot;:4,&quot;level&quot;:1,&quot;color&quot;:4,&quot;term&quot;:0,&quot;trait&quot;:0,&quot;legacy&quot;:1,&quot;orderTable&quot;:301,&quot;orderDeck&quot;:359}," calcext:value-type="string">
            <text:p>{"id":"3-73","name":"怒りの種","kana":"いかりのたね","traitText":null,"ruleText":"魔力ゾーンに置かれたとき、自分の山札の上から1枚を裏のまま魔力ゾーンに置く。","legacyText":"魔力化","imageUrl":"https://one-draw.jp/ijinden/cardlist/003/card/03_073.png","expansion":35,"rarity":1,"type":4,"level":1,"color":4,"term":0,"trait":0,"legacy":1,"orderTable":301,"orderDeck":359},</text:p>
          </table:table-cell>
          <table:table-cell table:number-columns-repeated="16347"/>
        </table:table-row>
        <table:table-row table:style-name="ro2">
          <table:table-cell office:value-type="float" office:value="302" calcext:value-type="float">
            <text:p>302</text:p>
          </table:table-cell>
          <table:table-cell office:value-type="float" office:value="364" calcext:value-type="float">
            <text:p>364</text:p>
          </table:table-cell>
          <table:table-cell office:value-type="string" calcext:value-type="string">
            <text:p>3-74</text:p>
          </table:table-cell>
          <table:table-cell office:value-type="float" office:value="74" calcext:value-type="float">
            <text:p>74</text:p>
          </table:table-cell>
          <table:table-cell office:value-type="string" calcext:value-type="string">
            <text:p>苦しみの種</text:p>
          </table:table-cell>
          <table:table-cell office:value-type="string" calcext:value-type="string">
            <text:p>くるしみのたね</text:p>
          </table:table-cell>
          <table:table-cell office:value-type="string" calcext:value-type="string">
            <text:p>第３弾ブースターパック</text:p>
          </table:table-cell>
          <table:table-cell table:formula="of:=VLOOKUP([.G303];[$収録番号.$A$1:$収録番号.$B$9];2;0)" office:value-type="float" office:value="35" calcext:value-type="float">
            <text:p>35</text:p>
          </table:table-cell>
          <table:table-cell office:value-type="string" calcext:value-type="string">
            <text:p>N</text:p>
          </table:table-cell>
          <table:table-cell table:formula="of:=VLOOKUP([.I303];[$レアリティ番号.$A$1:$レアリティ番号.$B$4];2;0)" office:value-type="float" office:value="1" calcext:value-type="float">
            <text:p>1</text:p>
          </table:table-cell>
          <table:table-cell office:value-type="string" calcext:value-type="string">
            <text:p>マリョク</text:p>
          </table:table-cell>
          <table:table-cell table:formula="of:=VLOOKUP([.K303];[$種類番号.$A$1:$種類番号.$B$4];2;0)" office:value-type="float" office:value="4" calcext:value-type="float">
            <text:p>4</text:p>
          </table:table-cell>
          <table:table-cell office:value-type="string" calcext:value-type="string">
            <text:p>黄</text:p>
          </table:table-cell>
          <table:table-cell table:formula="of:=VLOOKUP([.M303];[$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3];[$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V303];[$遺業能力番号.$A$1:$遺業能力番号.$B$9];2;0);0)" office:value-type="float" office:value="1" calcext:value-type="float">
            <text:p>1</text:p>
          </table:table-cell>
          <table:table-cell office:value-type="string" calcext:value-type="string">
            <text:p>https://one-draw.jp/ijinden/cardlist/003/card/03_074.png</text:p>
          </table:table-cell>
          <table:table-cell table:formula="of:=CONCATENATE([$JSON.$A$1];[.$C303];[$JSON.$B$1];[.$E303];[$JSON.$C$1];[.$F303];[$JSON.$D$1];IF(ISNA([.$S303]);&quot;null&quot;;&quot;&quot;&quot;&quot;&amp;[.$S303]&amp;&quot;&quot;&quot;&quot;);[$JSON.$E$1];[.$U303];[$JSON.$F$1];IF(ISNA([.$V303]);&quot;null&quot;;&quot;&quot;&quot;&quot;&amp;[.$V303]&amp;&quot;&quot;&quot;&quot;);[$JSON.$G$1];[.$X303];[$JSON.$H$1];[.$H303];[$JSON.$I$1];[.J303];[$JSON.$J$1];[.$L303];[$JSON.$K$1];[.$O303];[$JSON.$L$1];[.$N303];[$JSON.$M$1];[.$R303];[$JSON.$N$1];[.$T303];[$JSON.$O$1];[.$W303];[$JSON.$P$1];[.$A303];[$JSON.$Q$1];[.$B303];[$JSON.$R$1])" office:value-type="string" office:string-value="{&quot;id&quot;:&quot;3-74&quot;,&quot;name&quot;:&quot;苦しみの種&quot;,&quot;kana&quot;:&quot;くるしみのたね&quot;,&quot;traitText&quot;:null,&quot;ruleText&quot;:&quot;魔力ゾーンに置かれたとき、自分の山札の上から1枚を裏のまま魔力ゾーンに置く。&quot;,&quot;legacyText&quot;:&quot;魔力化&quot;,&quot;imageUrl&quot;:&quot;https://one-draw.jp/ijinden/cardlist/003/card/03_074.png&quot;,&quot;expansion&quot;:35,&quot;rarity&quot;:1,&quot;type&quot;:4,&quot;level&quot;:1,&quot;color&quot;:8,&quot;term&quot;:0,&quot;trait&quot;:0,&quot;legacy&quot;:1,&quot;orderTable&quot;:302,&quot;orderDeck&quot;:364}," calcext:value-type="string">
            <text:p>{"id":"3-74","name":"苦しみの種","kana":"くるしみのたね","traitText":null,"ruleText":"魔力ゾーンに置かれたとき、自分の山札の上から1枚を裏のまま魔力ゾーンに置く。","legacyText":"魔力化","imageUrl":"https://one-draw.jp/ijinden/cardlist/003/card/03_074.png","expansion":35,"rarity":1,"type":4,"level":1,"color":8,"term":0,"trait":0,"legacy":1,"orderTable":302,"orderDeck":364},</text:p>
          </table:table-cell>
          <table:table-cell table:number-columns-repeated="16347"/>
        </table:table-row>
        <table:table-row table:style-name="ro2">
          <table:table-cell office:value-type="float" office:value="303" calcext:value-type="float">
            <text:p>303</text:p>
          </table:table-cell>
          <table:table-cell office:value-type="float" office:value="369" calcext:value-type="float">
            <text:p>369</text:p>
          </table:table-cell>
          <table:table-cell office:value-type="string" calcext:value-type="string">
            <text:p>3-75</text:p>
          </table:table-cell>
          <table:table-cell office:value-type="float" office:value="75" calcext:value-type="float">
            <text:p>75</text:p>
          </table:table-cell>
          <table:table-cell office:value-type="string" calcext:value-type="string">
            <text:p>悲しみの種</text:p>
          </table:table-cell>
          <table:table-cell office:value-type="string" calcext:value-type="string">
            <text:p>かなしみのたね</text:p>
          </table:table-cell>
          <table:table-cell office:value-type="string" calcext:value-type="string">
            <text:p>第３弾ブースターパック</text:p>
          </table:table-cell>
          <table:table-cell table:formula="of:=VLOOKUP([.G304];[$収録番号.$A$1:$収録番号.$B$9];2;0)" office:value-type="float" office:value="35" calcext:value-type="float">
            <text:p>35</text:p>
          </table:table-cell>
          <table:table-cell office:value-type="string" calcext:value-type="string">
            <text:p>N</text:p>
          </table:table-cell>
          <table:table-cell table:formula="of:=VLOOKUP([.I304];[$レアリティ番号.$A$1:$レアリティ番号.$B$4];2;0)" office:value-type="float" office:value="1" calcext:value-type="float">
            <text:p>1</text:p>
          </table:table-cell>
          <table:table-cell office:value-type="string" calcext:value-type="string">
            <text:p>マリョク</text:p>
          </table:table-cell>
          <table:table-cell table:formula="of:=VLOOKUP([.K304];[$種類番号.$A$1:$種類番号.$B$4];2;0)" office:value-type="float" office:value="4" calcext:value-type="float">
            <text:p>4</text:p>
          </table:table-cell>
          <table:table-cell office:value-type="string" calcext:value-type="string">
            <text:p>紫</text:p>
          </table:table-cell>
          <table:table-cell table:formula="of:=VLOOKUP([.M304];[$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4];[$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V304];[$遺業能力番号.$A$1:$遺業能力番号.$B$9];2;0);0)" office:value-type="float" office:value="1" calcext:value-type="float">
            <text:p>1</text:p>
          </table:table-cell>
          <table:table-cell office:value-type="string" calcext:value-type="string">
            <text:p>https://one-draw.jp/ijinden/cardlist/003/card/03_075.png</text:p>
          </table:table-cell>
          <table:table-cell table:formula="of:=CONCATENATE([$JSON.$A$1];[.$C304];[$JSON.$B$1];[.$E304];[$JSON.$C$1];[.$F304];[$JSON.$D$1];IF(ISNA([.$S304]);&quot;null&quot;;&quot;&quot;&quot;&quot;&amp;[.$S304]&amp;&quot;&quot;&quot;&quot;);[$JSON.$E$1];[.$U304];[$JSON.$F$1];IF(ISNA([.$V304]);&quot;null&quot;;&quot;&quot;&quot;&quot;&amp;[.$V304]&amp;&quot;&quot;&quot;&quot;);[$JSON.$G$1];[.$X304];[$JSON.$H$1];[.$H304];[$JSON.$I$1];[.J304];[$JSON.$J$1];[.$L304];[$JSON.$K$1];[.$O304];[$JSON.$L$1];[.$N304];[$JSON.$M$1];[.$R304];[$JSON.$N$1];[.$T304];[$JSON.$O$1];[.$W304];[$JSON.$P$1];[.$A304];[$JSON.$Q$1];[.$B304];[$JSON.$R$1])" office:value-type="string" office:string-value="{&quot;id&quot;:&quot;3-75&quot;,&quot;name&quot;:&quot;悲しみの種&quot;,&quot;kana&quot;:&quot;かなしみのたね&quot;,&quot;traitText&quot;:null,&quot;ruleText&quot;:&quot;魔力ゾーンに置かれたとき、自分の山札の上から1枚を裏のまま魔力ゾーンに置く。&quot;,&quot;legacyText&quot;:&quot;魔力化&quot;,&quot;imageUrl&quot;:&quot;https://one-draw.jp/ijinden/cardlist/003/card/03_075.png&quot;,&quot;expansion&quot;:35,&quot;rarity&quot;:1,&quot;type&quot;:4,&quot;level&quot;:1,&quot;color&quot;:16,&quot;term&quot;:0,&quot;trait&quot;:0,&quot;legacy&quot;:1,&quot;orderTable&quot;:303,&quot;orderDeck&quot;:369}," calcext:value-type="string">
            <text:p>{"id":"3-75","name":"悲しみの種","kana":"かなしみのたね","traitText":null,"ruleText":"魔力ゾーンに置かれたとき、自分の山札の上から1枚を裏のまま魔力ゾーンに置く。","legacyText":"魔力化","imageUrl":"https://one-draw.jp/ijinden/cardlist/003/card/03_075.png","expansion":35,"rarity":1,"type":4,"level":1,"color":16,"term":0,"trait":0,"legacy":1,"orderTable":303,"orderDeck":369},</text:p>
          </table:table-cell>
          <table:table-cell table:number-columns-repeated="16347"/>
        </table:table-row>
        <table:table-row table:style-name="ro2">
          <table:table-cell office:value-type="float" office:value="304" calcext:value-type="float">
            <text:p>304</text:p>
          </table:table-cell>
          <table:table-cell office:value-type="float" office:value="370" calcext:value-type="float">
            <text:p>370</text:p>
          </table:table-cell>
          <table:table-cell office:value-type="string" calcext:value-type="string">
            <text:p>3-76</text:p>
          </table:table-cell>
          <table:table-cell office:value-type="float" office:value="76" calcext:value-type="float">
            <text:p>76</text:p>
          </table:table-cell>
          <table:table-cell office:value-type="string" calcext:value-type="string">
            <text:p>ダンダラ羽織</text:p>
          </table:table-cell>
          <table:table-cell office:value-type="string" calcext:value-type="string">
            <text:p>だんだらばおり</text:p>
          </table:table-cell>
          <table:table-cell office:value-type="string" calcext:value-type="string">
            <text:p>第３弾ブースターパック</text:p>
          </table:table-cell>
          <table:table-cell table:formula="of:=VLOOKUP([.G305];[$収録番号.$A$1:$収録番号.$B$9];2;0)" office:value-type="float" office:value="35" calcext:value-type="float">
            <text:p>35</text:p>
          </table:table-cell>
          <table:table-cell office:value-type="string" calcext:value-type="string">
            <text:p>N</text:p>
          </table:table-cell>
          <table:table-cell table:formula="of:=VLOOKUP([.I305];[$レアリティ番号.$A$1:$レアリティ番号.$B$4];2;0)" office:value-type="float" office:value="1" calcext:value-type="float">
            <text:p>1</text:p>
          </table:table-cell>
          <table:table-cell office:value-type="string" calcext:value-type="string">
            <text:p>マリョク</text:p>
          </table:table-cell>
          <table:table-cell table:formula="of:=VLOOKUP([.K305];[$種類番号.$A$1:$種類番号.$B$4];2;0)" office:value-type="float" office:value="4" calcext:value-type="float">
            <text:p>4</text:p>
          </table:table-cell>
          <table:table-cell office:value-type="string" calcext:value-type="string">
            <text:p>紫</text:p>
          </table:table-cell>
          <table:table-cell table:formula="of:=VLOOKUP([.M305];[$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5];[$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特性：志願」 ガーディアンが自分の戦場にいない間「即応 ダブルプレッシャー」を得る。</text:p>
          </table:table-cell>
          <table:table-cell table:style-name="ce8" office:value-type="string" calcext:value-type="string">
            <text:p>復元</text:p>
          </table:table-cell>
          <table:table-cell table:formula="of:=IFERROR(VLOOKUP([.$V305];[$遺業能力番号.$A$1:$遺業能力番号.$B$9];2;0);0)" office:value-type="float" office:value="3" calcext:value-type="float">
            <text:p>3</text:p>
          </table:table-cell>
          <table:table-cell office:value-type="string" calcext:value-type="string">
            <text:p>https://one-draw.jp/ijinden/cardlist/003/card/03_076.png</text:p>
          </table:table-cell>
          <table:table-cell table:formula="of:=CONCATENATE([$JSON.$A$1];[.$C305];[$JSON.$B$1];[.$E305];[$JSON.$C$1];[.$F305];[$JSON.$D$1];IF(ISNA([.$S305]);&quot;null&quot;;&quot;&quot;&quot;&quot;&amp;[.$S305]&amp;&quot;&quot;&quot;&quot;);[$JSON.$E$1];[.$U305];[$JSON.$F$1];IF(ISNA([.$V305]);&quot;null&quot;;&quot;&quot;&quot;&quot;&amp;[.$V305]&amp;&quot;&quot;&quot;&quot;);[$JSON.$G$1];[.$X305];[$JSON.$H$1];[.$H305];[$JSON.$I$1];[.J305];[$JSON.$J$1];[.$L305];[$JSON.$K$1];[.$O305];[$JSON.$L$1];[.$N305];[$JSON.$M$1];[.$R305];[$JSON.$N$1];[.$T305];[$JSON.$O$1];[.$W305];[$JSON.$P$1];[.$A305];[$JSON.$Q$1];[.$B305];[$JSON.$R$1])" office:value-type="string" office:string-value="{&quot;id&quot;:&quot;3-76&quot;,&quot;name&quot;:&quot;ダンダラ羽織&quot;,&quot;kana&quot;:&quot;だんだらばおり&quot;,&quot;traitText&quot;:null,&quot;ruleText&quot;:&quot;イジン召喚によってイジンが自分の戦場に置かれる際、そのイジンに装備させてもよい。¶装備 : 「特性：志願」 ガーディアンが自分の戦場にいない間「即応 ダブルプレッシャー」を得る。&quot;,&quot;legacyText&quot;:&quot;復元&quot;,&quot;imageUrl&quot;:&quot;https://one-draw.jp/ijinden/cardlist/003/card/03_076.png&quot;,&quot;expansion&quot;:35,&quot;rarity&quot;:1,&quot;type&quot;:4,&quot;level&quot;:1,&quot;color&quot;:16,&quot;term&quot;:0,&quot;trait&quot;:0,&quot;legacy&quot;:3,&quot;orderTable&quot;:304,&quot;orderDeck&quot;:370}," calcext:value-type="string">
            <text:p>{"id":"3-76","name":"ダンダラ羽織","kana":"だんだらばおり","traitText":null,"ruleText":"イジン召喚によってイジンが自分の戦場に置かれる際、そのイジンに装備させてもよい。¶装備 : 「特性：志願」 ガーディアンが自分の戦場にいない間「即応 ダブルプレッシャー」を得る。","legacyText":"復元","imageUrl":"https://one-draw.jp/ijinden/cardlist/003/card/03_076.png","expansion":35,"rarity":1,"type":4,"level":1,"color":16,"term":0,"trait":0,"legacy":3,"orderTable":304,"orderDeck":370},</text:p>
          </table:table-cell>
          <table:table-cell table:number-columns-repeated="16347"/>
        </table:table-row>
        <table:table-row table:style-name="ro2">
          <table:table-cell office:value-type="float" office:value="305" calcext:value-type="float">
            <text:p>305</text:p>
          </table:table-cell>
          <table:table-cell office:value-type="float" office:value="342" calcext:value-type="float">
            <text:p>342</text:p>
          </table:table-cell>
          <table:table-cell office:value-type="string" calcext:value-type="string">
            <text:p>3-77</text:p>
          </table:table-cell>
          <table:table-cell office:value-type="float" office:value="77" calcext:value-type="float">
            <text:p>77</text:p>
          </table:table-cell>
          <table:table-cell office:value-type="string" calcext:value-type="string">
            <text:p>遁甲盤</text:p>
          </table:table-cell>
          <table:table-cell office:value-type="string" calcext:value-type="string">
            <text:p>とんこうばん</text:p>
          </table:table-cell>
          <table:table-cell office:value-type="string" calcext:value-type="string">
            <text:p>第３弾ブースターパック</text:p>
          </table:table-cell>
          <table:table-cell table:formula="of:=VLOOKUP([.G306];[$収録番号.$A$1:$収録番号.$B$9];2;0)" office:value-type="float" office:value="35" calcext:value-type="float">
            <text:p>35</text:p>
          </table:table-cell>
          <table:table-cell office:value-type="string" calcext:value-type="string">
            <text:p>N</text:p>
          </table:table-cell>
          <table:table-cell table:formula="of:=VLOOKUP([.I306];[$レアリティ番号.$A$1:$レアリティ番号.$B$4];2;0)" office:value-type="float" office:value="1" calcext:value-type="float">
            <text:p>1</text:p>
          </table:table-cell>
          <table:table-cell office:value-type="string" calcext:value-type="string">
            <text:p>マリョク</text:p>
          </table:table-cell>
          <table:table-cell table:formula="of:=VLOOKUP([.K306];[$種類番号.$A$1:$種類番号.$B$4];2;0)" office:value-type="float" office:value="4" calcext:value-type="float">
            <text:p>4</text:p>
          </table:table-cell>
          <table:table-cell office:value-type="string" calcext:value-type="string">
            <text:p>無色</text:p>
          </table:table-cell>
          <table:table-cell table:formula="of:=VLOOKUP([.M306];[$色番号.$A$1:$色番号.$B$10];2;0)" office:value-type="float" office:value="64" calcext:value-type="float">
            <text:p>64</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6];[$特性番号.$A$1:$特性番号.$B$8];2;0);0)" office:value-type="float" office:value="0" calcext:value-type="float">
            <text:p>0</text:p>
          </table:table-cell>
          <table:table-cell office:value-type="string" calcext:value-type="string">
            <text:p>相手のターンのブロックステップが開始したとき、これが魔力ゾーンに裏で置かれているなら、これを表にして、アタッカー1体を指定して発動できる。そのアタッカーをアタッカーでない状態にする。</text:p>
          </table:table-cell>
          <table:table-cell table:style-name="ce8" office:value-type="string" calcext:value-type="string">
            <text:p>手札に戻す</text:p>
          </table:table-cell>
          <table:table-cell table:formula="of:=IFERROR(VLOOKUP([.$V306];[$遺業能力番号.$A$1:$遺業能力番号.$B$9];2;0);0)" office:value-type="float" office:value="5" calcext:value-type="float">
            <text:p>5</text:p>
          </table:table-cell>
          <table:table-cell office:value-type="string" calcext:value-type="string">
            <text:p>https://one-draw.jp/ijinden/cardlist/003/card/03_077.png</text:p>
          </table:table-cell>
          <table:table-cell table:formula="of:=CONCATENATE([$JSON.$A$1];[.$C306];[$JSON.$B$1];[.$E306];[$JSON.$C$1];[.$F306];[$JSON.$D$1];IF(ISNA([.$S306]);&quot;null&quot;;&quot;&quot;&quot;&quot;&amp;[.$S306]&amp;&quot;&quot;&quot;&quot;);[$JSON.$E$1];[.$U306];[$JSON.$F$1];IF(ISNA([.$V306]);&quot;null&quot;;&quot;&quot;&quot;&quot;&amp;[.$V306]&amp;&quot;&quot;&quot;&quot;);[$JSON.$G$1];[.$X306];[$JSON.$H$1];[.$H306];[$JSON.$I$1];[.J306];[$JSON.$J$1];[.$L306];[$JSON.$K$1];[.$O306];[$JSON.$L$1];[.$N306];[$JSON.$M$1];[.$R306];[$JSON.$N$1];[.$T306];[$JSON.$O$1];[.$W306];[$JSON.$P$1];[.$A306];[$JSON.$Q$1];[.$B306];[$JSON.$R$1])" office:value-type="string" office:string-value="{&quot;id&quot;:&quot;3-77&quot;,&quot;name&quot;:&quot;遁甲盤&quot;,&quot;kana&quot;:&quot;とんこうばん&quot;,&quot;traitText&quot;:null,&quot;ruleText&quot;:&quot;相手のターンのブロックステップが開始したとき、これが魔力ゾーンに裏で置かれているなら、これを表にして、アタッカー1体を指定して発動できる。そのアタッカーをアタッカーでない状態にする。&quot;,&quot;legacyText&quot;:&quot;手札に戻す&quot;,&quot;imageUrl&quot;:&quot;https://one-draw.jp/ijinden/cardlist/003/card/03_077.png&quot;,&quot;expansion&quot;:35,&quot;rarity&quot;:1,&quot;type&quot;:4,&quot;level&quot;:0,&quot;color&quot;:64,&quot;term&quot;:0,&quot;trait&quot;:0,&quot;legacy&quot;:5,&quot;orderTable&quot;:305,&quot;orderDeck&quot;:342}," calcext:value-type="string">
            <text:p>{"id":"3-77","name":"遁甲盤","kana":"とんこうばん","traitText":null,"ruleText":"相手のターンのブロックステップが開始したとき、これが魔力ゾーンに裏で置かれているなら、これを表にして、アタッカー1体を指定して発動できる。そのアタッカーをアタッカーでない状態にする。","legacyText":"手札に戻す","imageUrl":"https://one-draw.jp/ijinden/cardlist/003/card/03_077.png","expansion":35,"rarity":1,"type":4,"level":0,"color":64,"term":0,"trait":0,"legacy":5,"orderTable":305,"orderDeck":342},</text:p>
          </table:table-cell>
          <table:table-cell table:number-columns-repeated="16347"/>
        </table:table-row>
        <table:table-row table:style-name="ro2">
          <table:table-cell office:value-type="float" office:value="306" calcext:value-type="float">
            <text:p>306</text:p>
          </table:table-cell>
          <table:table-cell office:value-type="float" office:value="375" calcext:value-type="float">
            <text:p>375</text:p>
          </table:table-cell>
          <table:table-cell office:value-type="string" calcext:value-type="string">
            <text:p>3-78</text:p>
          </table:table-cell>
          <table:table-cell office:value-type="float" office:value="78" calcext:value-type="float">
            <text:p>78</text:p>
          </table:table-cell>
          <table:table-cell office:value-type="string" calcext:value-type="string">
            <text:p>ホムンクルス</text:p>
          </table:table-cell>
          <table:table-cell office:value-type="string" calcext:value-type="string">
            <text:p>ほむんくるす</text:p>
          </table:table-cell>
          <table:table-cell office:value-type="string" calcext:value-type="string">
            <text:p>第３弾ブースターパック</text:p>
          </table:table-cell>
          <table:table-cell table:formula="of:=VLOOKUP([.G307];[$収録番号.$A$1:$収録番号.$B$9];2;0)" office:value-type="float" office:value="35" calcext:value-type="float">
            <text:p>35</text:p>
          </table:table-cell>
          <table:table-cell office:value-type="string" calcext:value-type="string">
            <text:p>N</text:p>
          </table:table-cell>
          <table:table-cell table:formula="of:=VLOOKUP([.I307];[$レアリティ番号.$A$1:$レアリティ番号.$B$4];2;0)" office:value-type="float" office:value="1" calcext:value-type="float">
            <text:p>1</text:p>
          </table:table-cell>
          <table:table-cell office:value-type="string" calcext:value-type="string">
            <text:p>マリョク</text:p>
          </table:table-cell>
          <table:table-cell table:formula="of:=VLOOKUP([.K307];[$種類番号.$A$1:$種類番号.$B$4];2;0)" office:value-type="float" office:value="4" calcext:value-type="float">
            <text:p>4</text:p>
          </table:table-cell>
          <table:table-cell office:value-type="string" calcext:value-type="string">
            <text:p>無色</text:p>
          </table:table-cell>
          <table:table-cell table:formula="of:=VLOOKUP([.M307];[$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7];[$特性番号.$A$1:$特性番号.$B$8];2;0);0)" office:value-type="float" office:value="0" calcext:value-type="float">
            <text:p>0</text:p>
          </table:table-cell>
          <table:table-cell office:value-type="string" calcext:value-type="string">
            <text:p>自分のメインフェイズが開始したとき、自分の手札のレベル3以下のイジン1体を指定して発動できる。そのイジンを戦場に置いて、これを墓地に置く。¶冥装¶装備 : 「色 ： 赤 青 緑 黄 紫」</text:p>
          </table:table-cell>
          <table:table-cell table:style-name="ce8" table:formula="of:=NA()" office:value-type="string" office:string-value="" calcext:value-type="error">
            <text:p>#N/A</text:p>
          </table:table-cell>
          <table:table-cell table:formula="of:=IFERROR(VLOOKUP([.$V307];[$遺業能力番号.$A$1:$遺業能力番号.$B$9];2;0);0)" office:value-type="float" office:value="0" calcext:value-type="float">
            <text:p>0</text:p>
          </table:table-cell>
          <table:table-cell office:value-type="string" calcext:value-type="string">
            <text:p>https://one-draw.jp/ijinden/cardlist/003/card/03_078.png</text:p>
          </table:table-cell>
          <table:table-cell table:formula="of:=CONCATENATE([$JSON.$A$1];[.$C307];[$JSON.$B$1];[.$E307];[$JSON.$C$1];[.$F307];[$JSON.$D$1];IF(ISNA([.$S307]);&quot;null&quot;;&quot;&quot;&quot;&quot;&amp;[.$S307]&amp;&quot;&quot;&quot;&quot;);[$JSON.$E$1];[.$U307];[$JSON.$F$1];IF(ISNA([.$V307]);&quot;null&quot;;&quot;&quot;&quot;&quot;&amp;[.$V307]&amp;&quot;&quot;&quot;&quot;);[$JSON.$G$1];[.$X307];[$JSON.$H$1];[.$H307];[$JSON.$I$1];[.J307];[$JSON.$J$1];[.$L307];[$JSON.$K$1];[.$O307];[$JSON.$L$1];[.$N307];[$JSON.$M$1];[.$R307];[$JSON.$N$1];[.$T307];[$JSON.$O$1];[.$W307];[$JSON.$P$1];[.$A307];[$JSON.$Q$1];[.$B307];[$JSON.$R$1])" office:value-type="string" office:string-value="{&quot;id&quot;:&quot;3-78&quot;,&quot;name&quot;:&quot;ホムンクルス&quot;,&quot;kana&quot;:&quot;ほむんくるす&quot;,&quot;traitText&quot;:null,&quot;ruleText&quot;:&quot;自分のメインフェイズが開始したとき、自分の手札のレベル3以下のイジン1体を指定して発動できる。そのイジンを戦場に置いて、これを墓地に置く。¶冥装¶装備 : 「色 ： 赤 青 緑 黄 紫」&quot;,&quot;legacyText&quot;:null,&quot;imageUrl&quot;:&quot;https://one-draw.jp/ijinden/cardlist/003/card/03_078.png&quot;,&quot;expansion&quot;:35,&quot;rarity&quot;:1,&quot;type&quot;:4,&quot;level&quot;:1,&quot;color&quot;:64,&quot;term&quot;:0,&quot;trait&quot;:0,&quot;legacy&quot;:0,&quot;orderTable&quot;:306,&quot;orderDeck&quot;:375}," calcext:value-type="string">
            <text:p>{"id":"3-78","name":"ホムンクルス","kana":"ほむんくるす","traitText":null,"ruleText":"自分のメインフェイズが開始したとき、自分の手札のレベル3以下のイジン1体を指定して発動できる。そのイジンを戦場に置いて、これを墓地に置く。¶冥装¶装備 : 「色 ： 赤 青 緑 黄 紫」","legacyText":null,"imageUrl":"https://one-draw.jp/ijinden/cardlist/003/card/03_078.png","expansion":35,"rarity":1,"type":4,"level":1,"color":64,"term":0,"trait":0,"legacy":0,"orderTable":306,"orderDeck":375},</text:p>
          </table:table-cell>
          <table:table-cell table:number-columns-repeated="16347"/>
        </table:table-row>
        <table:table-row table:style-name="ro2">
          <table:table-cell office:value-type="float" office:value="307" calcext:value-type="float">
            <text:p>307</text:p>
          </table:table-cell>
          <table:table-cell office:value-type="float" office:value="376" calcext:value-type="float">
            <text:p>376</text:p>
          </table:table-cell>
          <table:table-cell office:value-type="string" calcext:value-type="string">
            <text:p>3-79</text:p>
          </table:table-cell>
          <table:table-cell office:value-type="float" office:value="79" calcext:value-type="float">
            <text:p>79</text:p>
          </table:table-cell>
          <table:table-cell office:value-type="string" calcext:value-type="string">
            <text:p>ストーンマスク</text:p>
          </table:table-cell>
          <table:table-cell office:value-type="string" calcext:value-type="string">
            <text:p>すとーんますく</text:p>
          </table:table-cell>
          <table:table-cell office:value-type="string" calcext:value-type="string">
            <text:p>第３弾ブースターパック</text:p>
          </table:table-cell>
          <table:table-cell table:formula="of:=VLOOKUP([.G308];[$収録番号.$A$1:$収録番号.$B$9];2;0)" office:value-type="float" office:value="35" calcext:value-type="float">
            <text:p>35</text:p>
          </table:table-cell>
          <table:table-cell office:value-type="string" calcext:value-type="string">
            <text:p>N</text:p>
          </table:table-cell>
          <table:table-cell table:formula="of:=VLOOKUP([.I308];[$レアリティ番号.$A$1:$レアリティ番号.$B$4];2;0)" office:value-type="float" office:value="1" calcext:value-type="float">
            <text:p>1</text:p>
          </table:table-cell>
          <table:table-cell office:value-type="string" calcext:value-type="string">
            <text:p>マリョク</text:p>
          </table:table-cell>
          <table:table-cell table:formula="of:=VLOOKUP([.K308];[$種類番号.$A$1:$種類番号.$B$4];2;0)" office:value-type="float" office:value="4" calcext:value-type="float">
            <text:p>4</text:p>
          </table:table-cell>
          <table:table-cell office:value-type="string" calcext:value-type="string">
            <text:p>無色</text:p>
          </table:table-cell>
          <table:table-cell table:formula="of:=VLOOKUP([.M308];[$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8];[$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戦場に置かれたとき、1ドローする。</text:p>
          </table:table-cell>
          <table:table-cell table:style-name="ce8" office:value-type="string" calcext:value-type="string">
            <text:p>復元</text:p>
          </table:table-cell>
          <table:table-cell table:formula="of:=IFERROR(VLOOKUP([.$V308];[$遺業能力番号.$A$1:$遺業能力番号.$B$9];2;0);0)" office:value-type="float" office:value="3" calcext:value-type="float">
            <text:p>3</text:p>
          </table:table-cell>
          <table:table-cell office:value-type="string" calcext:value-type="string">
            <text:p>https://one-draw.jp/ijinden/cardlist/003/card/03_079.png</text:p>
          </table:table-cell>
          <table:table-cell table:formula="of:=CONCATENATE([$JSON.$A$1];[.$C308];[$JSON.$B$1];[.$E308];[$JSON.$C$1];[.$F308];[$JSON.$D$1];IF(ISNA([.$S308]);&quot;null&quot;;&quot;&quot;&quot;&quot;&amp;[.$S308]&amp;&quot;&quot;&quot;&quot;);[$JSON.$E$1];[.$U308];[$JSON.$F$1];IF(ISNA([.$V308]);&quot;null&quot;;&quot;&quot;&quot;&quot;&amp;[.$V308]&amp;&quot;&quot;&quot;&quot;);[$JSON.$G$1];[.$X308];[$JSON.$H$1];[.$H308];[$JSON.$I$1];[.J308];[$JSON.$J$1];[.$L308];[$JSON.$K$1];[.$O308];[$JSON.$L$1];[.$N308];[$JSON.$M$1];[.$R308];[$JSON.$N$1];[.$T308];[$JSON.$O$1];[.$W308];[$JSON.$P$1];[.$A308];[$JSON.$Q$1];[.$B308];[$JSON.$R$1])" office:value-type="string" office:string-value="{&quot;id&quot;:&quot;3-79&quot;,&quot;name&quot;:&quot;ストーンマスク&quot;,&quot;kana&quot;:&quot;すとーんますく&quot;,&quot;traitText&quot;:null,&quot;ruleText&quot;:&quot;イジン召喚によってイジンが自分の戦場に置かれる際、そのイジンに装備させてもよい。¶装備 : 戦場に置かれたとき、1ドローする。&quot;,&quot;legacyText&quot;:&quot;復元&quot;,&quot;imageUrl&quot;:&quot;https://one-draw.jp/ijinden/cardlist/003/card/03_079.png&quot;,&quot;expansion&quot;:35,&quot;rarity&quot;:1,&quot;type&quot;:4,&quot;level&quot;:1,&quot;color&quot;:64,&quot;term&quot;:0,&quot;trait&quot;:0,&quot;legacy&quot;:3,&quot;orderTable&quot;:307,&quot;orderDeck&quot;:376}," calcext:value-type="string">
            <text:p>{"id":"3-79","name":"ストーンマスク","kana":"すとーんますく","traitText":null,"ruleText":"イジン召喚によってイジンが自分の戦場に置かれる際、そのイジンに装備させてもよい。¶装備 : 戦場に置かれたとき、1ドローする。","legacyText":"復元","imageUrl":"https://one-draw.jp/ijinden/cardlist/003/card/03_079.png","expansion":35,"rarity":1,"type":4,"level":1,"color":64,"term":0,"trait":0,"legacy":3,"orderTable":307,"orderDeck":376},</text:p>
          </table:table-cell>
          <table:table-cell table:number-columns-repeated="16347"/>
        </table:table-row>
        <table:table-row table:style-name="ro2">
          <table:table-cell office:value-type="float" office:value="308" calcext:value-type="float">
            <text:p>308</text:p>
          </table:table-cell>
          <table:table-cell office:value-type="float" office:value="390" calcext:value-type="float">
            <text:p>390</text:p>
          </table:table-cell>
          <table:table-cell office:value-type="string" calcext:value-type="string">
            <text:p>3-80</text:p>
          </table:table-cell>
          <table:table-cell office:value-type="float" office:value="80" calcext:value-type="float">
            <text:p>80</text:p>
          </table:table-cell>
          <table:table-cell office:value-type="string" calcext:value-type="string">
            <text:p>オブシディアン</text:p>
          </table:table-cell>
          <table:table-cell office:value-type="string" calcext:value-type="string">
            <text:p>おぶしでぃあん</text:p>
          </table:table-cell>
          <table:table-cell office:value-type="string" calcext:value-type="string">
            <text:p>第３弾ブースターパック</text:p>
          </table:table-cell>
          <table:table-cell table:formula="of:=VLOOKUP([.G309];[$収録番号.$A$1:$収録番号.$B$9];2;0)" office:value-type="float" office:value="35" calcext:value-type="float">
            <text:p>35</text:p>
          </table:table-cell>
          <table:table-cell office:value-type="string" calcext:value-type="string">
            <text:p>R</text:p>
          </table:table-cell>
          <table:table-cell table:formula="of:=VLOOKUP([.I309];[$レアリティ番号.$A$1:$レアリティ番号.$B$4];2;0)" office:value-type="float" office:value="2" calcext:value-type="float">
            <text:p>2</text:p>
          </table:table-cell>
          <table:table-cell office:value-type="string" calcext:value-type="string">
            <text:p>マリョク</text:p>
          </table:table-cell>
          <table:table-cell table:formula="of:=VLOOKUP([.K309];[$種類番号.$A$1:$種類番号.$B$4];2;0)" office:value-type="float" office:value="4" calcext:value-type="float">
            <text:p>4</text:p>
          </table:table-cell>
          <table:table-cell office:value-type="string" calcext:value-type="string">
            <text:p>無色</text:p>
          </table:table-cell>
          <table:table-cell table:formula="of:=VLOOKUP([.M309];[$色番号.$A$1:$色番号.$B$10];2;0)" office:value-type="float" office:value="64" calcext:value-type="float">
            <text:p>6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9];[$特性番号.$A$1:$特性番号.$B$8];2;0);0)" office:value-type="float" office:value="0" calcext:value-type="float">
            <text:p>0</text:p>
          </table:table-cell>
          <table:table-cell/>
          <table:table-cell table:style-name="ce8" office:value-type="string" calcext:value-type="string">
            <text:p>魔力化</text:p>
          </table:table-cell>
          <table:table-cell table:formula="of:=IFERROR(VLOOKUP([.$V309];[$遺業能力番号.$A$1:$遺業能力番号.$B$9];2;0);0)" office:value-type="float" office:value="1" calcext:value-type="float">
            <text:p>1</text:p>
          </table:table-cell>
          <table:table-cell office:value-type="string" calcext:value-type="string">
            <text:p>https://one-draw.jp/ijinden/cardlist/003/card/03_080.png</text:p>
          </table:table-cell>
          <table:table-cell table:formula="of:=CONCATENATE([$JSON.$A$1];[.$C309];[$JSON.$B$1];[.$E309];[$JSON.$C$1];[.$F309];[$JSON.$D$1];IF(ISNA([.$S309]);&quot;null&quot;;&quot;&quot;&quot;&quot;&amp;[.$S309]&amp;&quot;&quot;&quot;&quot;);[$JSON.$E$1];[.$U309];[$JSON.$F$1];IF(ISNA([.$V309]);&quot;null&quot;;&quot;&quot;&quot;&quot;&amp;[.$V309]&amp;&quot;&quot;&quot;&quot;);[$JSON.$G$1];[.$X309];[$JSON.$H$1];[.$H309];[$JSON.$I$1];[.J309];[$JSON.$J$1];[.$L309];[$JSON.$K$1];[.$O309];[$JSON.$L$1];[.$N309];[$JSON.$M$1];[.$R309];[$JSON.$N$1];[.$T309];[$JSON.$O$1];[.$W309];[$JSON.$P$1];[.$A309];[$JSON.$Q$1];[.$B309];[$JSON.$R$1])" office:value-type="string" office:string-value="{&quot;id&quot;:&quot;3-80&quot;,&quot;name&quot;:&quot;オブシディアン&quot;,&quot;kana&quot;:&quot;おぶしでぃあん&quot;,&quot;traitText&quot;:null,&quot;ruleText&quot;:&quot;&quot;,&quot;legacyText&quot;:&quot;魔力化&quot;,&quot;imageUrl&quot;:&quot;https://one-draw.jp/ijinden/cardlist/003/card/03_080.png&quot;,&quot;expansion&quot;:35,&quot;rarity&quot;:2,&quot;type&quot;:4,&quot;level&quot;:3,&quot;color&quot;:64,&quot;term&quot;:0,&quot;trait&quot;:0,&quot;legacy&quot;:1,&quot;orderTable&quot;:308,&quot;orderDeck&quot;:390}," calcext:value-type="string">
            <text:p>{"id":"3-80","name":"オブシディアン","kana":"おぶしでぃあん","traitText":null,"ruleText":"","legacyText":"魔力化","imageUrl":"https://one-draw.jp/ijinden/cardlist/003/card/03_080.png","expansion":35,"rarity":2,"type":4,"level":3,"color":64,"term":0,"trait":0,"legacy":1,"orderTable":308,"orderDeck":390},</text:p>
          </table:table-cell>
          <table:table-cell table:number-columns-repeated="16347"/>
        </table:table-row>
        <table:table-row table:style-name="ro2">
          <table:table-cell office:value-type="float" office:value="310" calcext:value-type="float">
            <text:p>310</text:p>
          </table:table-cell>
          <table:table-cell office:value-type="float" office:value="184" calcext:value-type="float">
            <text:p>184</text:p>
          </table:table-cell>
          <table:table-cell office:value-type="string" calcext:value-type="string">
            <text:p>4-1</text:p>
          </table:table-cell>
          <table:table-cell office:value-type="float" office:value="1" calcext:value-type="float">
            <text:p>1</text:p>
          </table:table-cell>
          <table:table-cell office:value-type="string" calcext:value-type="string">
            <text:p>西郷隆盛</text:p>
          </table:table-cell>
          <table:table-cell office:value-type="string" calcext:value-type="string">
            <text:p>さいごうたかもり</text:p>
          </table:table-cell>
          <table:table-cell office:value-type="string" calcext:value-type="string">
            <text:p>第４弾ブースターパック</text:p>
          </table:table-cell>
          <table:table-cell table:formula="of:=VLOOKUP([.G310];[$収録番号.$A$1:$収録番号.$B$9];2;0)" office:value-type="float" office:value="45" calcext:value-type="float">
            <text:p>45</text:p>
          </table:table-cell>
          <table:table-cell office:value-type="string" calcext:value-type="string">
            <text:p>SR</text:p>
          </table:table-cell>
          <table:table-cell table:formula="of:=VLOOKUP([.I310];[$レアリティ番号.$A$1:$レアリティ番号.$B$4];2;0)" office:value-type="float" office:value="4" calcext:value-type="float">
            <text:p>4</text:p>
          </table:table-cell>
          <table:table-cell office:value-type="string" calcext:value-type="string">
            <text:p>イジン</text:p>
          </table:table-cell>
          <table:table-cell table:formula="of:=VLOOKUP([.K310];[$種類番号.$A$1:$種類番号.$B$4];2;0)" office:value-type="float" office:value="1" calcext:value-type="float">
            <text:p>1</text:p>
          </table:table-cell>
          <table:table-cell office:value-type="string" calcext:value-type="string">
            <text:p>赤</text:p>
          </table:table-cell>
          <table:table-cell table:formula="of:=VLOOKUP([.M310];[$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0];[$特性番号.$A$1:$特性番号.$B$8];2;0);0)" office:value-type="float" office:value="0" calcext:value-type="float">
            <text:p>0</text:p>
          </table:table-cell>
          <table:table-cell office:value-type="string" calcext:value-type="string">
            <text:p>モータル¶イジンが相手の戦場にいる間「アタック+3000」を得る。</text:p>
          </table:table-cell>
          <table:table-cell table:style-name="ce8" table:formula="of:=NA()" office:value-type="string" office:string-value="" calcext:value-type="error">
            <text:p>#N/A</text:p>
          </table:table-cell>
          <table:table-cell table:formula="of:=IFERROR(VLOOKUP([.$V310];[$遺業能力番号.$A$1:$遺業能力番号.$B$9];2;0);0)" office:value-type="float" office:value="0" calcext:value-type="float">
            <text:p>0</text:p>
          </table:table-cell>
          <table:table-cell office:value-type="string" calcext:value-type="string">
            <text:p>https://one-draw.jp/ijinden/cardlist/004/card/04_001.png</text:p>
          </table:table-cell>
          <table:table-cell table:formula="of:=CONCATENATE([$JSON.$A$1];[.$C310];[$JSON.$B$1];[.$E310];[$JSON.$C$1];[.$F310];[$JSON.$D$1];IF(ISNA([.$S310]);&quot;null&quot;;&quot;&quot;&quot;&quot;&amp;[.$S310]&amp;&quot;&quot;&quot;&quot;);[$JSON.$E$1];[.$U310];[$JSON.$F$1];IF(ISNA([.$V310]);&quot;null&quot;;&quot;&quot;&quot;&quot;&amp;[.$V310]&amp;&quot;&quot;&quot;&quot;);[$JSON.$G$1];[.$X310];[$JSON.$H$1];[.$H310];[$JSON.$I$1];[.J310];[$JSON.$J$1];[.$L310];[$JSON.$K$1];[.$O310];[$JSON.$L$1];[.$N310];[$JSON.$M$1];[.$R310];[$JSON.$N$1];[.$T310];[$JSON.$O$1];[.$W310];[$JSON.$P$1];[.$A310];[$JSON.$Q$1];[.$B310];[$JSON.$R$1])" office:value-type="string" office:string-value="{&quot;id&quot;:&quot;4-1&quot;,&quot;name&quot;:&quot;西郷隆盛&quot;,&quot;kana&quot;:&quot;さいごうたかもり&quot;,&quot;traitText&quot;:null,&quot;ruleText&quot;:&quot;モータル¶イジンが相手の戦場にいる間「アタック+3000」を得る。&quot;,&quot;legacyText&quot;:null,&quot;imageUrl&quot;:&quot;https://one-draw.jp/ijinden/cardlist/004/card/04_001.png&quot;,&quot;expansion&quot;:45,&quot;rarity&quot;:4,&quot;type&quot;:1,&quot;level&quot;:6,&quot;color&quot;:1,&quot;term&quot;:0,&quot;trait&quot;:0,&quot;legacy&quot;:0,&quot;orderTable&quot;:310,&quot;orderDeck&quot;:184}," calcext:value-type="string">
            <text:p>{"id":"4-1","name":"西郷隆盛","kana":"さいごうたかもり","traitText":null,"ruleText":"モータル¶イジンが相手の戦場にいる間「アタック+3000」を得る。","legacyText":null,"imageUrl":"https://one-draw.jp/ijinden/cardlist/004/card/04_001.png","expansion":45,"rarity":4,"type":1,"level":6,"color":1,"term":0,"trait":0,"legacy":0,"orderTable":310,"orderDeck":184},</text:p>
          </table:table-cell>
          <table:table-cell table:number-columns-repeated="16347"/>
        </table:table-row>
        <table:table-row table:style-name="ro2">
          <table:table-cell office:value-type="float" office:value="311" calcext:value-type="float">
            <text:p>311</text:p>
          </table:table-cell>
          <table:table-cell office:value-type="float" office:value="73" calcext:value-type="float">
            <text:p>73</text:p>
          </table:table-cell>
          <table:table-cell office:value-type="string" calcext:value-type="string">
            <text:p>4-2</text:p>
          </table:table-cell>
          <table:table-cell office:value-type="float" office:value="2" calcext:value-type="float">
            <text:p>2</text:p>
          </table:table-cell>
          <table:table-cell office:value-type="string" calcext:value-type="string">
            <text:p>リチャード・アークライト</text:p>
          </table:table-cell>
          <table:table-cell office:value-type="string" calcext:value-type="string">
            <text:p>りちゃーどあーくらいと</text:p>
          </table:table-cell>
          <table:table-cell office:value-type="string" calcext:value-type="string">
            <text:p>第４弾ブースターパック</text:p>
          </table:table-cell>
          <table:table-cell table:formula="of:=VLOOKUP([.G311];[$収録番号.$A$1:$収録番号.$B$9];2;0)" office:value-type="float" office:value="45" calcext:value-type="float">
            <text:p>45</text:p>
          </table:table-cell>
          <table:table-cell office:value-type="string" calcext:value-type="string">
            <text:p>SR</text:p>
          </table:table-cell>
          <table:table-cell table:formula="of:=VLOOKUP([.I311];[$レアリティ番号.$A$1:$レアリティ番号.$B$4];2;0)" office:value-type="float" office:value="4" calcext:value-type="float">
            <text:p>4</text:p>
          </table:table-cell>
          <table:table-cell office:value-type="string" calcext:value-type="string">
            <text:p>イジン</text:p>
          </table:table-cell>
          <table:table-cell table:formula="of:=VLOOKUP([.K311];[$種類番号.$A$1:$種類番号.$B$4];2;0)" office:value-type="float" office:value="1" calcext:value-type="float">
            <text:p>1</text:p>
          </table:table-cell>
          <table:table-cell office:value-type="string" calcext:value-type="string">
            <text:p>赤</text:p>
          </table:table-cell>
          <table:table-cell table:formula="of:=VLOOKUP([.M311];[$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1];[$特性番号.$A$1:$特性番号.$B$8];2;0);0)" office:value-type="float" office:value="0" calcext:value-type="float">
            <text:p>0</text:p>
          </table:table-cell>
          <table:table-cell office:value-type="string" calcext:value-type="string">
            <text:p>戦場に置かれたとき、魔力ゾーンのレベル2以上のマリョクすべてを裏にする。¶アタッカーになったとき、魔力ゾーンの裏のカード1つを指定して発動できる。そのカードを手札に戻す。</text:p>
          </table:table-cell>
          <table:table-cell table:style-name="ce8" office:value-type="string" calcext:value-type="string">
            <text:p>魔力化</text:p>
          </table:table-cell>
          <table:table-cell table:formula="of:=IFERROR(VLOOKUP([.$V311];[$遺業能力番号.$A$1:$遺業能力番号.$B$9];2;0);0)" office:value-type="float" office:value="1" calcext:value-type="float">
            <text:p>1</text:p>
          </table:table-cell>
          <table:table-cell office:value-type="string" calcext:value-type="string">
            <text:p>https://one-draw.jp/ijinden/cardlist/004/card/04_002.png</text:p>
          </table:table-cell>
          <table:table-cell table:formula="of:=CONCATENATE([$JSON.$A$1];[.$C311];[$JSON.$B$1];[.$E311];[$JSON.$C$1];[.$F311];[$JSON.$D$1];IF(ISNA([.$S311]);&quot;null&quot;;&quot;&quot;&quot;&quot;&amp;[.$S311]&amp;&quot;&quot;&quot;&quot;);[$JSON.$E$1];[.$U311];[$JSON.$F$1];IF(ISNA([.$V311]);&quot;null&quot;;&quot;&quot;&quot;&quot;&amp;[.$V311]&amp;&quot;&quot;&quot;&quot;);[$JSON.$G$1];[.$X311];[$JSON.$H$1];[.$H311];[$JSON.$I$1];[.J311];[$JSON.$J$1];[.$L311];[$JSON.$K$1];[.$O311];[$JSON.$L$1];[.$N311];[$JSON.$M$1];[.$R311];[$JSON.$N$1];[.$T311];[$JSON.$O$1];[.$W311];[$JSON.$P$1];[.$A311];[$JSON.$Q$1];[.$B311];[$JSON.$R$1])" office:value-type="string" office:string-value="{&quot;id&quot;:&quot;4-2&quot;,&quot;name&quot;:&quot;リチャード・アークライト&quot;,&quot;kana&quot;:&quot;りちゃーどあーくらいと&quot;,&quot;traitText&quot;:null,&quot;ruleText&quot;:&quot;戦場に置かれたとき、魔力ゾーンのレベル2以上のマリョクすべてを裏にする。¶アタッカーになったとき、魔力ゾーンの裏のカード1つを指定して発動できる。そのカードを手札に戻す。&quot;,&quot;legacyText&quot;:&quot;魔力化&quot;,&quot;imageUrl&quot;:&quot;https://one-draw.jp/ijinden/cardlist/004/card/04_002.png&quot;,&quot;expansion&quot;:45,&quot;rarity&quot;:4,&quot;type&quot;:1,&quot;level&quot;:3,&quot;color&quot;:1,&quot;term&quot;:0,&quot;trait&quot;:0,&quot;legacy&quot;:1,&quot;orderTable&quot;:311,&quot;orderDeck&quot;:73}," calcext:value-type="string">
            <text:p>{"id":"4-2","name":"リチャード・アークライト","kana":"りちゃーどあーくらいと","traitText":null,"ruleText":"戦場に置かれたとき、魔力ゾーンのレベル2以上のマリョクすべてを裏にする。¶アタッカーになったとき、魔力ゾーンの裏のカード1つを指定して発動できる。そのカードを手札に戻す。","legacyText":"魔力化","imageUrl":"https://one-draw.jp/ijinden/cardlist/004/card/04_002.png","expansion":45,"rarity":4,"type":1,"level":3,"color":1,"term":0,"trait":0,"legacy":1,"orderTable":311,"orderDeck":73},</text:p>
          </table:table-cell>
          <table:table-cell table:number-columns-repeated="16347"/>
        </table:table-row>
        <table:table-row table:style-name="ro2">
          <table:table-cell office:value-type="float" office:value="312" calcext:value-type="float">
            <text:p>312</text:p>
          </table:table-cell>
          <table:table-cell office:value-type="float" office:value="122" calcext:value-type="float">
            <text:p>122</text:p>
          </table:table-cell>
          <table:table-cell office:value-type="string" calcext:value-type="string">
            <text:p>4-3</text:p>
          </table:table-cell>
          <table:table-cell office:value-type="float" office:value="3" calcext:value-type="float">
            <text:p>3</text:p>
          </table:table-cell>
          <table:table-cell office:value-type="string" calcext:value-type="string">
            <text:p>アンナ・パブロワ</text:p>
          </table:table-cell>
          <table:table-cell office:value-type="string" calcext:value-type="string">
            <text:p>あんなぱぶろわ</text:p>
          </table:table-cell>
          <table:table-cell office:value-type="string" calcext:value-type="string">
            <text:p>第４弾ブースターパック</text:p>
          </table:table-cell>
          <table:table-cell table:formula="of:=VLOOKUP([.G312];[$収録番号.$A$1:$収録番号.$B$9];2;0)" office:value-type="float" office:value="45" calcext:value-type="float">
            <text:p>45</text:p>
          </table:table-cell>
          <table:table-cell office:value-type="string" calcext:value-type="string">
            <text:p>SR</text:p>
          </table:table-cell>
          <table:table-cell table:formula="of:=VLOOKUP([.I312];[$レアリティ番号.$A$1:$レアリティ番号.$B$4];2;0)" office:value-type="float" office:value="4" calcext:value-type="float">
            <text:p>4</text:p>
          </table:table-cell>
          <table:table-cell office:value-type="string" calcext:value-type="string">
            <text:p>イジン</text:p>
          </table:table-cell>
          <table:table-cell table:formula="of:=VLOOKUP([.K312];[$種類番号.$A$1:$種類番号.$B$4];2;0)" office:value-type="float" office:value="1" calcext:value-type="float">
            <text:p>1</text:p>
          </table:table-cell>
          <table:table-cell office:value-type="string" calcext:value-type="string">
            <text:p>青</text:p>
          </table:table-cell>
          <table:table-cell table:formula="of:=VLOOKUP([.M312];[$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2];[$特性番号.$A$1:$特性番号.$B$8];2;0);0)" office:value-type="float" office:value="0" calcext:value-type="float">
            <text:p>0</text:p>
          </table:table-cell>
          <table:table-cell office:value-type="string" calcext:value-type="string">
            <text:p>「音楽」イジンが自分の戦場にいる間「破壊されない」を得る。¶戦場のガーディアンが寝たときに発動できる。戦場の寝ているガーディアン1体につき、戦場のイジン1体を手札に戻す。</text:p>
          </table:table-cell>
          <table:table-cell table:style-name="ce8" office:value-type="string" calcext:value-type="string">
            <text:p>1ドローする</text:p>
          </table:table-cell>
          <table:table-cell table:formula="of:=IFERROR(VLOOKUP([.$V312];[$遺業能力番号.$A$1:$遺業能力番号.$B$9];2;0);0)" office:value-type="float" office:value="4" calcext:value-type="float">
            <text:p>4</text:p>
          </table:table-cell>
          <table:table-cell office:value-type="string" calcext:value-type="string">
            <text:p>https://one-draw.jp/ijinden/cardlist/004/card/04_003.png</text:p>
          </table:table-cell>
          <table:table-cell table:formula="of:=CONCATENATE([$JSON.$A$1];[.$C312];[$JSON.$B$1];[.$E312];[$JSON.$C$1];[.$F312];[$JSON.$D$1];IF(ISNA([.$S312]);&quot;null&quot;;&quot;&quot;&quot;&quot;&amp;[.$S312]&amp;&quot;&quot;&quot;&quot;);[$JSON.$E$1];[.$U312];[$JSON.$F$1];IF(ISNA([.$V312]);&quot;null&quot;;&quot;&quot;&quot;&quot;&amp;[.$V312]&amp;&quot;&quot;&quot;&quot;);[$JSON.$G$1];[.$X312];[$JSON.$H$1];[.$H312];[$JSON.$I$1];[.J312];[$JSON.$J$1];[.$L312];[$JSON.$K$1];[.$O312];[$JSON.$L$1];[.$N312];[$JSON.$M$1];[.$R312];[$JSON.$N$1];[.$T312];[$JSON.$O$1];[.$W312];[$JSON.$P$1];[.$A312];[$JSON.$Q$1];[.$B312];[$JSON.$R$1])" office:value-type="string" office:string-value="{&quot;id&quot;:&quot;4-3&quot;,&quot;name&quot;:&quot;アンナ・パブロワ&quot;,&quot;kana&quot;:&quot;あんなぱぶろわ&quot;,&quot;traitText&quot;:null,&quot;ruleText&quot;:&quot;「音楽」イジンが自分の戦場にいる間「破壊されない」を得る。¶戦場のガーディアンが寝たときに発動できる。戦場の寝ているガーディアン1体につき、戦場のイジン1体を手札に戻す。&quot;,&quot;legacyText&quot;:&quot;1ドローする&quot;,&quot;imageUrl&quot;:&quot;https://one-draw.jp/ijinden/cardlist/004/card/04_003.png&quot;,&quot;expansion&quot;:45,&quot;rarity&quot;:4,&quot;type&quot;:1,&quot;level&quot;:4,&quot;color&quot;:2,&quot;term&quot;:0,&quot;trait&quot;:0,&quot;legacy&quot;:4,&quot;orderTable&quot;:312,&quot;orderDeck&quot;:122}," calcext:value-type="string">
            <text:p>{"id":"4-3","name":"アンナ・パブロワ","kana":"あんなぱぶろわ","traitText":null,"ruleText":"「音楽」イジンが自分の戦場にいる間「破壊されない」を得る。¶戦場のガーディアンが寝たときに発動できる。戦場の寝ているガーディアン1体につき、戦場のイジン1体を手札に戻す。","legacyText":"1ドローする","imageUrl":"https://one-draw.jp/ijinden/cardlist/004/card/04_003.png","expansion":45,"rarity":4,"type":1,"level":4,"color":2,"term":0,"trait":0,"legacy":4,"orderTable":312,"orderDeck":122},</text:p>
          </table:table-cell>
          <table:table-cell table:number-columns-repeated="16347"/>
        </table:table-row>
        <table:table-row table:style-name="ro2">
          <table:table-cell office:value-type="float" office:value="313" calcext:value-type="float">
            <text:p>313</text:p>
          </table:table-cell>
          <table:table-cell office:value-type="float" office:value="207" calcext:value-type="float">
            <text:p>207</text:p>
          </table:table-cell>
          <table:table-cell office:value-type="string" calcext:value-type="string">
            <text:p>4-4</text:p>
          </table:table-cell>
          <table:table-cell office:value-type="float" office:value="4" calcext:value-type="float">
            <text:p>4</text:p>
          </table:table-cell>
          <table:table-cell office:value-type="string" calcext:value-type="string">
            <text:p>ルイ14世</text:p>
          </table:table-cell>
          <table:table-cell office:value-type="string" calcext:value-type="string">
            <text:p>るいじゅうよんせい</text:p>
          </table:table-cell>
          <table:table-cell office:value-type="string" calcext:value-type="string">
            <text:p>第４弾ブースターパック</text:p>
          </table:table-cell>
          <table:table-cell table:formula="of:=VLOOKUP([.G313];[$収録番号.$A$1:$収録番号.$B$9];2;0)" office:value-type="float" office:value="45" calcext:value-type="float">
            <text:p>45</text:p>
          </table:table-cell>
          <table:table-cell office:value-type="string" calcext:value-type="string">
            <text:p>SR</text:p>
          </table:table-cell>
          <table:table-cell table:formula="of:=VLOOKUP([.I313];[$レアリティ番号.$A$1:$レアリティ番号.$B$4];2;0)" office:value-type="float" office:value="4" calcext:value-type="float">
            <text:p>4</text:p>
          </table:table-cell>
          <table:table-cell office:value-type="string" calcext:value-type="string">
            <text:p>イジン</text:p>
          </table:table-cell>
          <table:table-cell table:formula="of:=VLOOKUP([.K313];[$種類番号.$A$1:$種類番号.$B$4];2;0)" office:value-type="float" office:value="1" calcext:value-type="float">
            <text:p>1</text:p>
          </table:table-cell>
          <table:table-cell office:value-type="string" calcext:value-type="string">
            <text:p>青</text:p>
          </table:table-cell>
          <table:table-cell table:formula="of:=VLOOKUP([.M313];[$色番号.$A$1:$色番号.$B$10];2;0)" office:value-type="float" office:value="2" calcext:value-type="float">
            <text:p>2</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3];[$特性番号.$A$1:$特性番号.$B$8];2;0);0)" office:value-type="float" office:value="0" calcext:value-type="float">
            <text:p>0</text:p>
          </table:table-cell>
          <table:table-cell office:value-type="string" calcext:value-type="string">
            <text:p>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text:p>
          </table:table-cell>
          <table:table-cell table:style-name="ce8" table:formula="of:=NA()" office:value-type="string" office:string-value="" calcext:value-type="error">
            <text:p>#N/A</text:p>
          </table:table-cell>
          <table:table-cell table:formula="of:=IFERROR(VLOOKUP([.$V313];[$遺業能力番号.$A$1:$遺業能力番号.$B$9];2;0);0)" office:value-type="float" office:value="0" calcext:value-type="float">
            <text:p>0</text:p>
          </table:table-cell>
          <table:table-cell office:value-type="string" calcext:value-type="string">
            <text:p>https://one-draw.jp/ijinden/cardlist/004/card/04_004.png</text:p>
          </table:table-cell>
          <table:table-cell table:formula="of:=CONCATENATE([$JSON.$A$1];[.$C313];[$JSON.$B$1];[.$E313];[$JSON.$C$1];[.$F313];[$JSON.$D$1];IF(ISNA([.$S313]);&quot;null&quot;;&quot;&quot;&quot;&quot;&amp;[.$S313]&amp;&quot;&quot;&quot;&quot;);[$JSON.$E$1];[.$U313];[$JSON.$F$1];IF(ISNA([.$V313]);&quot;null&quot;;&quot;&quot;&quot;&quot;&amp;[.$V313]&amp;&quot;&quot;&quot;&quot;);[$JSON.$G$1];[.$X313];[$JSON.$H$1];[.$H313];[$JSON.$I$1];[.J313];[$JSON.$J$1];[.$L313];[$JSON.$K$1];[.$O313];[$JSON.$L$1];[.$N313];[$JSON.$M$1];[.$R313];[$JSON.$N$1];[.$T313];[$JSON.$O$1];[.$W313];[$JSON.$P$1];[.$A313];[$JSON.$Q$1];[.$B313];[$JSON.$R$1])" office:value-type="string" office:string-value="{&quot;id&quot;:&quot;4-4&quot;,&quot;name&quot;:&quot;ルイ14世&quot;,&quot;kana&quot;:&quot;るいじゅうよんせい&quot;,&quot;traitText&quot;:null,&quot;ruleText&quot;:&quot;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quot;,&quot;legacyText&quot;:null,&quot;imageUrl&quot;:&quot;https://one-draw.jp/ijinden/cardlist/004/card/04_004.png&quot;,&quot;expansion&quot;:45,&quot;rarity&quot;:4,&quot;type&quot;:1,&quot;level&quot;:7,&quot;color&quot;:2,&quot;term&quot;:0,&quot;trait&quot;:0,&quot;legacy&quot;:0,&quot;orderTable&quot;:313,&quot;orderDeck&quot;:207}," calcext:value-type="string">
            <text:p>{"id":"4-4","name":"ルイ14世","kana":"るいじゅうよんせい","traitText":null,"ruleText":"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legacyText":null,"imageUrl":"https://one-draw.jp/ijinden/cardlist/004/card/04_004.png","expansion":45,"rarity":4,"type":1,"level":7,"color":2,"term":0,"trait":0,"legacy":0,"orderTable":313,"orderDeck":207},</text:p>
          </table:table-cell>
          <table:table-cell table:number-columns-repeated="16347"/>
        </table:table-row>
        <table:table-row table:style-name="ro2">
          <table:table-cell office:value-type="float" office:value="314" calcext:value-type="float">
            <text:p>314</text:p>
          </table:table-cell>
          <table:table-cell office:value-type="float" office:value="50" calcext:value-type="float">
            <text:p>50</text:p>
          </table:table-cell>
          <table:table-cell office:value-type="string" calcext:value-type="string">
            <text:p>4-5</text:p>
          </table:table-cell>
          <table:table-cell office:value-type="float" office:value="5" calcext:value-type="float">
            <text:p>5</text:p>
          </table:table-cell>
          <table:table-cell office:value-type="string" calcext:value-type="string">
            <text:p>藤原不比等</text:p>
          </table:table-cell>
          <table:table-cell office:value-type="string" calcext:value-type="string">
            <text:p>ふじわらのふひと</text:p>
          </table:table-cell>
          <table:table-cell office:value-type="string" calcext:value-type="string">
            <text:p>第４弾ブースターパック</text:p>
          </table:table-cell>
          <table:table-cell table:formula="of:=VLOOKUP([.G314];[$収録番号.$A$1:$収録番号.$B$9];2;0)" office:value-type="float" office:value="45" calcext:value-type="float">
            <text:p>45</text:p>
          </table:table-cell>
          <table:table-cell office:value-type="string" calcext:value-type="string">
            <text:p>SR</text:p>
          </table:table-cell>
          <table:table-cell table:formula="of:=VLOOKUP([.I314];[$レアリティ番号.$A$1:$レアリティ番号.$B$4];2;0)" office:value-type="float" office:value="4" calcext:value-type="float">
            <text:p>4</text:p>
          </table:table-cell>
          <table:table-cell office:value-type="string" calcext:value-type="string">
            <text:p>イジン</text:p>
          </table:table-cell>
          <table:table-cell table:formula="of:=VLOOKUP([.K314];[$種類番号.$A$1:$種類番号.$B$4];2;0)" office:value-type="float" office:value="1" calcext:value-type="float">
            <text:p>1</text:p>
          </table:table-cell>
          <table:table-cell office:value-type="string" calcext:value-type="string">
            <text:p>緑</text:p>
          </table:table-cell>
          <table:table-cell table:formula="of:=VLOOKUP([.M314];[$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4];[$特性番号.$A$1:$特性番号.$B$8];2;0);0)" office:value-type="float" office:value="0" calcext:value-type="float">
            <text:p>0</text:p>
          </table:table-cell>
          <table:table-cell office:value-type="string" calcext:value-type="string">
            <text:p>能力によって、イジンが相手の戦場に置かれる際、そのイジンは寝ている状態で戦場に置かれる。¶相手の戦場のレベル5以下の寝ているイジンは、能力すべてを失う。この能力は、能力によって失われない。</text:p>
          </table:table-cell>
          <table:table-cell table:style-name="ce8" office:value-type="string" calcext:value-type="string">
            <text:p>反魂</text:p>
          </table:table-cell>
          <table:table-cell table:formula="of:=IFERROR(VLOOKUP([.$V314];[$遺業能力番号.$A$1:$遺業能力番号.$B$9];2;0);0)" office:value-type="float" office:value="6" calcext:value-type="float">
            <text:p>6</text:p>
          </table:table-cell>
          <table:table-cell office:value-type="string" calcext:value-type="string">
            <text:p>https://one-draw.jp/ijinden/cardlist/004/card/04_005.png</text:p>
          </table:table-cell>
          <table:table-cell table:formula="of:=CONCATENATE([$JSON.$A$1];[.$C314];[$JSON.$B$1];[.$E314];[$JSON.$C$1];[.$F314];[$JSON.$D$1];IF(ISNA([.$S314]);&quot;null&quot;;&quot;&quot;&quot;&quot;&amp;[.$S314]&amp;&quot;&quot;&quot;&quot;);[$JSON.$E$1];[.$U314];[$JSON.$F$1];IF(ISNA([.$V314]);&quot;null&quot;;&quot;&quot;&quot;&quot;&amp;[.$V314]&amp;&quot;&quot;&quot;&quot;);[$JSON.$G$1];[.$X314];[$JSON.$H$1];[.$H314];[$JSON.$I$1];[.J314];[$JSON.$J$1];[.$L314];[$JSON.$K$1];[.$O314];[$JSON.$L$1];[.$N314];[$JSON.$M$1];[.$R314];[$JSON.$N$1];[.$T314];[$JSON.$O$1];[.$W314];[$JSON.$P$1];[.$A314];[$JSON.$Q$1];[.$B314];[$JSON.$R$1])" office:value-type="string" office:string-value="{&quot;id&quot;:&quot;4-5&quot;,&quot;name&quot;:&quot;藤原不比等&quot;,&quot;kana&quot;:&quot;ふじわらのふひと&quot;,&quot;traitText&quot;:null,&quot;ruleText&quot;:&quot;能力によって、イジンが相手の戦場に置かれる際、そのイジンは寝ている状態で戦場に置かれる。¶相手の戦場のレベル5以下の寝ているイジンは、能力すべてを失う。この能力は、能力によって失われない。&quot;,&quot;legacyText&quot;:&quot;反魂&quot;,&quot;imageUrl&quot;:&quot;https://one-draw.jp/ijinden/cardlist/004/card/04_005.png&quot;,&quot;expansion&quot;:45,&quot;rarity&quot;:4,&quot;type&quot;:1,&quot;level&quot;:2,&quot;color&quot;:4,&quot;term&quot;:0,&quot;trait&quot;:0,&quot;legacy&quot;:6,&quot;orderTable&quot;:314,&quot;orderDeck&quot;:50}," calcext:value-type="string">
            <text:p>{"id":"4-5","name":"藤原不比等","kana":"ふじわらのふひと","traitText":null,"ruleText":"能力によって、イジンが相手の戦場に置かれる際、そのイジンは寝ている状態で戦場に置かれる。¶相手の戦場のレベル5以下の寝ているイジンは、能力すべてを失う。この能力は、能力によって失われない。","legacyText":"反魂","imageUrl":"https://one-draw.jp/ijinden/cardlist/004/card/04_005.png","expansion":45,"rarity":4,"type":1,"level":2,"color":4,"term":0,"trait":0,"legacy":6,"orderTable":314,"orderDeck":50},</text:p>
          </table:table-cell>
          <table:table-cell table:number-columns-repeated="16347"/>
        </table:table-row>
        <table:table-row table:style-name="ro2">
          <table:table-cell office:value-type="float" office:value="315" calcext:value-type="float">
            <text:p>315</text:p>
          </table:table-cell>
          <table:table-cell office:value-type="float" office:value="130" calcext:value-type="float">
            <text:p>130</text:p>
          </table:table-cell>
          <table:table-cell office:value-type="string" calcext:value-type="string">
            <text:p>4-6</text:p>
          </table:table-cell>
          <table:table-cell office:value-type="float" office:value="6" calcext:value-type="float">
            <text:p>6</text:p>
          </table:table-cell>
          <table:table-cell office:value-type="string" calcext:value-type="string">
            <text:p>伊能忠敬</text:p>
          </table:table-cell>
          <table:table-cell office:value-type="string" calcext:value-type="string">
            <text:p>いのうただたか</text:p>
          </table:table-cell>
          <table:table-cell office:value-type="string" calcext:value-type="string">
            <text:p>第４弾ブースターパック</text:p>
          </table:table-cell>
          <table:table-cell table:formula="of:=VLOOKUP([.G315];[$収録番号.$A$1:$収録番号.$B$9];2;0)" office:value-type="float" office:value="45" calcext:value-type="float">
            <text:p>45</text:p>
          </table:table-cell>
          <table:table-cell office:value-type="string" calcext:value-type="string">
            <text:p>SR</text:p>
          </table:table-cell>
          <table:table-cell table:formula="of:=VLOOKUP([.I315];[$レアリティ番号.$A$1:$レアリティ番号.$B$4];2;0)" office:value-type="float" office:value="4" calcext:value-type="float">
            <text:p>4</text:p>
          </table:table-cell>
          <table:table-cell office:value-type="string" calcext:value-type="string">
            <text:p>イジン</text:p>
          </table:table-cell>
          <table:table-cell table:formula="of:=VLOOKUP([.K315];[$種類番号.$A$1:$種類番号.$B$4];2;0)" office:value-type="float" office:value="1" calcext:value-type="float">
            <text:p>1</text:p>
          </table:table-cell>
          <table:table-cell office:value-type="string" calcext:value-type="string">
            <text:p>緑</text:p>
          </table:table-cell>
          <table:table-cell table:formula="of:=VLOOKUP([.M315];[$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5];[$特性番号.$A$1:$特性番号.$B$8];2;0);0)" office:value-type="float" office:value="0" calcext:value-type="float">
            <text:p>0</text:p>
          </table:table-cell>
          <table:table-cell office:value-type="string" calcext:value-type="string">
            <text:p>戦場に置かれたとき「マリョク配置権+1する」か「自分の墓地のハイケイすべてを手札に戻す」のどちらかを発揮する。¶自分はハイケイ使用に際し、色条件を満たしていなくても手札のカードを使える。</text:p>
          </table:table-cell>
          <table:table-cell table:style-name="ce8" office:value-type="string" calcext:value-type="string">
            <text:p>1ドローする</text:p>
          </table:table-cell>
          <table:table-cell table:formula="of:=IFERROR(VLOOKUP([.$V315];[$遺業能力番号.$A$1:$遺業能力番号.$B$9];2;0);0)" office:value-type="float" office:value="4" calcext:value-type="float">
            <text:p>4</text:p>
          </table:table-cell>
          <table:table-cell office:value-type="string" calcext:value-type="string">
            <text:p>https://one-draw.jp/ijinden/cardlist/004/card/04_006.png</text:p>
          </table:table-cell>
          <table:table-cell table:formula="of:=CONCATENATE([$JSON.$A$1];[.$C315];[$JSON.$B$1];[.$E315];[$JSON.$C$1];[.$F315];[$JSON.$D$1];IF(ISNA([.$S315]);&quot;null&quot;;&quot;&quot;&quot;&quot;&amp;[.$S315]&amp;&quot;&quot;&quot;&quot;);[$JSON.$E$1];[.$U315];[$JSON.$F$1];IF(ISNA([.$V315]);&quot;null&quot;;&quot;&quot;&quot;&quot;&amp;[.$V315]&amp;&quot;&quot;&quot;&quot;);[$JSON.$G$1];[.$X315];[$JSON.$H$1];[.$H315];[$JSON.$I$1];[.J315];[$JSON.$J$1];[.$L315];[$JSON.$K$1];[.$O315];[$JSON.$L$1];[.$N315];[$JSON.$M$1];[.$R315];[$JSON.$N$1];[.$T315];[$JSON.$O$1];[.$W315];[$JSON.$P$1];[.$A315];[$JSON.$Q$1];[.$B315];[$JSON.$R$1])" office:value-type="string" office:string-value="{&quot;id&quot;:&quot;4-6&quot;,&quot;name&quot;:&quot;伊能忠敬&quot;,&quot;kana&quot;:&quot;いのうただたか&quot;,&quot;traitText&quot;:null,&quot;ruleText&quot;:&quot;戦場に置かれたとき「マリョク配置権+1する」か「自分の墓地のハイケイすべてを手札に戻す」のどちらかを発揮する。¶自分はハイケイ使用に際し、色条件を満たしていなくても手札のカードを使える。&quot;,&quot;legacyText&quot;:&quot;1ドローする&quot;,&quot;imageUrl&quot;:&quot;https://one-draw.jp/ijinden/cardlist/004/card/04_006.png&quot;,&quot;expansion&quot;:45,&quot;rarity&quot;:4,&quot;type&quot;:1,&quot;level&quot;:4,&quot;color&quot;:4,&quot;term&quot;:0,&quot;trait&quot;:0,&quot;legacy&quot;:4,&quot;orderTable&quot;:315,&quot;orderDeck&quot;:130}," calcext:value-type="string">
            <text:p>{"id":"4-6","name":"伊能忠敬","kana":"いのうただたか","traitText":null,"ruleText":"戦場に置かれたとき「マリョク配置権+1する」か「自分の墓地のハイケイすべてを手札に戻す」のどちらかを発揮する。¶自分はハイケイ使用に際し、色条件を満たしていなくても手札のカードを使える。","legacyText":"1ドローする","imageUrl":"https://one-draw.jp/ijinden/cardlist/004/card/04_006.png","expansion":45,"rarity":4,"type":1,"level":4,"color":4,"term":0,"trait":0,"legacy":4,"orderTable":315,"orderDeck":130},</text:p>
          </table:table-cell>
          <table:table-cell table:number-columns-repeated="16347"/>
        </table:table-row>
        <table:table-row table:style-name="ro2">
          <table:table-cell office:value-type="float" office:value="316" calcext:value-type="float">
            <text:p>316</text:p>
          </table:table-cell>
          <table:table-cell office:value-type="float" office:value="137" calcext:value-type="float">
            <text:p>137</text:p>
          </table:table-cell>
          <table:table-cell office:value-type="string" calcext:value-type="string">
            <text:p>4-7</text:p>
          </table:table-cell>
          <table:table-cell office:value-type="float" office:value="7" calcext:value-type="float">
            <text:p>7</text:p>
          </table:table-cell>
          <table:table-cell office:value-type="string" calcext:value-type="string">
            <text:p>アリエノール・ダキテーヌ</text:p>
          </table:table-cell>
          <table:table-cell office:value-type="string" calcext:value-type="string">
            <text:p>ありえのーるだきてーぬ</text:p>
          </table:table-cell>
          <table:table-cell office:value-type="string" calcext:value-type="string">
            <text:p>第４弾ブースターパック</text:p>
          </table:table-cell>
          <table:table-cell table:formula="of:=VLOOKUP([.G316];[$収録番号.$A$1:$収録番号.$B$9];2;0)" office:value-type="float" office:value="45" calcext:value-type="float">
            <text:p>45</text:p>
          </table:table-cell>
          <table:table-cell office:value-type="string" calcext:value-type="string">
            <text:p>SR</text:p>
          </table:table-cell>
          <table:table-cell table:formula="of:=VLOOKUP([.I316];[$レアリティ番号.$A$1:$レアリティ番号.$B$4];2;0)" office:value-type="float" office:value="4" calcext:value-type="float">
            <text:p>4</text:p>
          </table:table-cell>
          <table:table-cell office:value-type="string" calcext:value-type="string">
            <text:p>イジン</text:p>
          </table:table-cell>
          <table:table-cell table:formula="of:=VLOOKUP([.K316];[$種類番号.$A$1:$種類番号.$B$4];2;0)" office:value-type="float" office:value="1" calcext:value-type="float">
            <text:p>1</text:p>
          </table:table-cell>
          <table:table-cell office:value-type="string" calcext:value-type="string">
            <text:p>黄</text:p>
          </table:table-cell>
          <table:table-cell table:formula="of:=VLOOKUP([.M316];[$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6];[$特性番号.$A$1:$特性番号.$B$8];2;0);0)" office:value-type="float" office:value="0" calcext:value-type="float">
            <text:p>0</text:p>
          </table:table-cell>
          <table:table-cell office:value-type="string" calcext:value-type="string">
            <text:p>これが戦場にいる間、自分の魔力ゾーンのマリョクは「色：赤 青」を得る。¶破壊されたとき、自分の山札の上から2枚を墓地に置いて発動できる。これを破壊されていない状態にする。</text:p>
          </table:table-cell>
          <table:table-cell table:style-name="ce8" office:value-type="string" calcext:value-type="string">
            <text:p>魔力化</text:p>
          </table:table-cell>
          <table:table-cell table:formula="of:=IFERROR(VLOOKUP([.$V316];[$遺業能力番号.$A$1:$遺業能力番号.$B$9];2;0);0)" office:value-type="float" office:value="1" calcext:value-type="float">
            <text:p>1</text:p>
          </table:table-cell>
          <table:table-cell office:value-type="string" calcext:value-type="string">
            <text:p>https://one-draw.jp/ijinden/cardlist/004/card/04_007.png</text:p>
          </table:table-cell>
          <table:table-cell table:formula="of:=CONCATENATE([$JSON.$A$1];[.$C316];[$JSON.$B$1];[.$E316];[$JSON.$C$1];[.$F316];[$JSON.$D$1];IF(ISNA([.$S316]);&quot;null&quot;;&quot;&quot;&quot;&quot;&amp;[.$S316]&amp;&quot;&quot;&quot;&quot;);[$JSON.$E$1];[.$U316];[$JSON.$F$1];IF(ISNA([.$V316]);&quot;null&quot;;&quot;&quot;&quot;&quot;&amp;[.$V316]&amp;&quot;&quot;&quot;&quot;);[$JSON.$G$1];[.$X316];[$JSON.$H$1];[.$H316];[$JSON.$I$1];[.J316];[$JSON.$J$1];[.$L316];[$JSON.$K$1];[.$O316];[$JSON.$L$1];[.$N316];[$JSON.$M$1];[.$R316];[$JSON.$N$1];[.$T316];[$JSON.$O$1];[.$W316];[$JSON.$P$1];[.$A316];[$JSON.$Q$1];[.$B316];[$JSON.$R$1])" office:value-type="string" office:string-value="{&quot;id&quot;:&quot;4-7&quot;,&quot;name&quot;:&quot;アリエノール・ダキテーヌ&quot;,&quot;kana&quot;:&quot;ありえのーるだきてーぬ&quot;,&quot;traitText&quot;:null,&quot;ruleText&quot;:&quot;これが戦場にいる間、自分の魔力ゾーンのマリョクは「色：赤 青」を得る。¶破壊されたとき、自分の山札の上から2枚を墓地に置いて発動できる。これを破壊されていない状態にする。&quot;,&quot;legacyText&quot;:&quot;魔力化&quot;,&quot;imageUrl&quot;:&quot;https://one-draw.jp/ijinden/cardlist/004/card/04_007.png&quot;,&quot;expansion&quot;:45,&quot;rarity&quot;:4,&quot;type&quot;:1,&quot;level&quot;:4,&quot;color&quot;:8,&quot;term&quot;:0,&quot;trait&quot;:0,&quot;legacy&quot;:1,&quot;orderTable&quot;:316,&quot;orderDeck&quot;:137}," calcext:value-type="string">
            <text:p>{"id":"4-7","name":"アリエノール・ダキテーヌ","kana":"ありえのーるだきてーぬ","traitText":null,"ruleText":"これが戦場にいる間、自分の魔力ゾーンのマリョクは「色：赤 青」を得る。¶破壊されたとき、自分の山札の上から2枚を墓地に置いて発動できる。これを破壊されていない状態にする。","legacyText":"魔力化","imageUrl":"https://one-draw.jp/ijinden/cardlist/004/card/04_007.png","expansion":45,"rarity":4,"type":1,"level":4,"color":8,"term":0,"trait":0,"legacy":1,"orderTable":316,"orderDeck":137},</text:p>
          </table:table-cell>
          <table:table-cell table:number-columns-repeated="16347"/>
        </table:table-row>
        <table:table-row table:style-name="ro2">
          <table:table-cell office:value-type="float" office:value="317" calcext:value-type="float">
            <text:p>317</text:p>
          </table:table-cell>
          <table:table-cell office:value-type="float" office:value="217" calcext:value-type="float">
            <text:p>217</text:p>
          </table:table-cell>
          <table:table-cell office:value-type="string" calcext:value-type="string">
            <text:p>4-8</text:p>
          </table:table-cell>
          <table:table-cell office:value-type="float" office:value="8" calcext:value-type="float">
            <text:p>8</text:p>
          </table:table-cell>
          <table:table-cell office:value-type="string" calcext:value-type="string">
            <text:p>アルキメデス</text:p>
          </table:table-cell>
          <table:table-cell office:value-type="string" calcext:value-type="string">
            <text:p>あるきめです</text:p>
          </table:table-cell>
          <table:table-cell office:value-type="string" calcext:value-type="string">
            <text:p>第４弾ブースターパック</text:p>
          </table:table-cell>
          <table:table-cell table:formula="of:=VLOOKUP([.G317];[$収録番号.$A$1:$収録番号.$B$9];2;0)" office:value-type="float" office:value="45" calcext:value-type="float">
            <text:p>45</text:p>
          </table:table-cell>
          <table:table-cell office:value-type="string" calcext:value-type="string">
            <text:p>SR</text:p>
          </table:table-cell>
          <table:table-cell table:formula="of:=VLOOKUP([.I317];[$レアリティ番号.$A$1:$レアリティ番号.$B$4];2;0)" office:value-type="float" office:value="4" calcext:value-type="float">
            <text:p>4</text:p>
          </table:table-cell>
          <table:table-cell office:value-type="string" calcext:value-type="string">
            <text:p>イジン</text:p>
          </table:table-cell>
          <table:table-cell table:formula="of:=VLOOKUP([.K317];[$種類番号.$A$1:$種類番号.$B$4];2;0)" office:value-type="float" office:value="1" calcext:value-type="float">
            <text:p>1</text:p>
          </table:table-cell>
          <table:table-cell office:value-type="string" calcext:value-type="string">
            <text:p>黄</text:p>
          </table:table-cell>
          <table:table-cell table:formula="of:=VLOOKUP([.M317];[$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7];[$特性番号.$A$1:$特性番号.$B$8];2;0);0)" office:value-type="float" office:value="0" calcext:value-type="float">
            <text:p>0</text:p>
          </table:table-cell>
          <table:table-cell office:value-type="string" calcext:value-type="string">
            <text:p>ウォッチャー¶これのイジン召喚に際し、これのレベルは、自分の墓地の『魔導』能力を持つマホウ1つにつき1だけ下がる。¶戦場に置かれたとき、自分の墓地の『魔導』能力を持つマホウすべてを手札に戻す。</text:p>
          </table:table-cell>
          <table:table-cell table:style-name="ce8" office:value-type="string" calcext:value-type="string">
            <text:p>魔力化</text:p>
          </table:table-cell>
          <table:table-cell table:formula="of:=IFERROR(VLOOKUP([.$V317];[$遺業能力番号.$A$1:$遺業能力番号.$B$9];2;0);0)" office:value-type="float" office:value="1" calcext:value-type="float">
            <text:p>1</text:p>
          </table:table-cell>
          <table:table-cell office:value-type="string" calcext:value-type="string">
            <text:p>https://one-draw.jp/ijinden/cardlist/004/card/04_008.png</text:p>
          </table:table-cell>
          <table:table-cell table:formula="of:=CONCATENATE([$JSON.$A$1];[.$C317];[$JSON.$B$1];[.$E317];[$JSON.$C$1];[.$F317];[$JSON.$D$1];IF(ISNA([.$S317]);&quot;null&quot;;&quot;&quot;&quot;&quot;&amp;[.$S317]&amp;&quot;&quot;&quot;&quot;);[$JSON.$E$1];[.$U317];[$JSON.$F$1];IF(ISNA([.$V317]);&quot;null&quot;;&quot;&quot;&quot;&quot;&amp;[.$V317]&amp;&quot;&quot;&quot;&quot;);[$JSON.$G$1];[.$X317];[$JSON.$H$1];[.$H317];[$JSON.$I$1];[.J317];[$JSON.$J$1];[.$L317];[$JSON.$K$1];[.$O317];[$JSON.$L$1];[.$N317];[$JSON.$M$1];[.$R317];[$JSON.$N$1];[.$T317];[$JSON.$O$1];[.$W317];[$JSON.$P$1];[.$A317];[$JSON.$Q$1];[.$B317];[$JSON.$R$1])" office:value-type="string" office:string-value="{&quot;id&quot;:&quot;4-8&quot;,&quot;name&quot;:&quot;アルキメデス&quot;,&quot;kana&quot;:&quot;あるきめです&quot;,&quot;traitText&quot;:null,&quot;ruleText&quot;:&quot;ウォッチャー¶これのイジン召喚に際し、これのレベルは、自分の墓地の『魔導』能力を持つマホウ1つにつき1だけ下がる。¶戦場に置かれたとき、自分の墓地の『魔導』能力を持つマホウすべてを手札に戻す。&quot;,&quot;legacyText&quot;:&quot;魔力化&quot;,&quot;imageUrl&quot;:&quot;https://one-draw.jp/ijinden/cardlist/004/card/04_008.png&quot;,&quot;expansion&quot;:45,&quot;rarity&quot;:4,&quot;type&quot;:1,&quot;level&quot;:7,&quot;color&quot;:8,&quot;term&quot;:0,&quot;trait&quot;:0,&quot;legacy&quot;:1,&quot;orderTable&quot;:317,&quot;orderDeck&quot;:217}," calcext:value-type="string">
            <text:p>{"id":"4-8","name":"アルキメデス","kana":"あるきめです","traitText":null,"ruleText":"ウォッチャー¶これのイジン召喚に際し、これのレベルは、自分の墓地の『魔導』能力を持つマホウ1つにつき1だけ下がる。¶戦場に置かれたとき、自分の墓地の『魔導』能力を持つマホウすべてを手札に戻す。","legacyText":"魔力化","imageUrl":"https://one-draw.jp/ijinden/cardlist/004/card/04_008.png","expansion":45,"rarity":4,"type":1,"level":7,"color":8,"term":0,"trait":0,"legacy":1,"orderTable":317,"orderDeck":217},</text:p>
          </table:table-cell>
          <table:table-cell table:number-columns-repeated="16347"/>
        </table:table-row>
        <table:table-row table:style-name="ro2">
          <table:table-cell office:value-type="float" office:value="318" calcext:value-type="float">
            <text:p>318</text:p>
          </table:table-cell>
          <table:table-cell office:value-type="float" office:value="178" calcext:value-type="float">
            <text:p>178</text:p>
          </table:table-cell>
          <table:table-cell office:value-type="string" calcext:value-type="string">
            <text:p>4-9</text:p>
          </table:table-cell>
          <table:table-cell office:value-type="float" office:value="9" calcext:value-type="float">
            <text:p>9</text:p>
          </table:table-cell>
          <table:table-cell office:value-type="string" calcext:value-type="string">
            <text:p>レオニダス</text:p>
          </table:table-cell>
          <table:table-cell office:value-type="string" calcext:value-type="string">
            <text:p>れおにだす</text:p>
          </table:table-cell>
          <table:table-cell office:value-type="string" calcext:value-type="string">
            <text:p>第４弾ブースターパック</text:p>
          </table:table-cell>
          <table:table-cell table:formula="of:=VLOOKUP([.G318];[$収録番号.$A$1:$収録番号.$B$9];2;0)" office:value-type="float" office:value="45" calcext:value-type="float">
            <text:p>45</text:p>
          </table:table-cell>
          <table:table-cell office:value-type="string" calcext:value-type="string">
            <text:p>SR</text:p>
          </table:table-cell>
          <table:table-cell table:formula="of:=VLOOKUP([.I318];[$レアリティ番号.$A$1:$レアリティ番号.$B$4];2;0)" office:value-type="float" office:value="4" calcext:value-type="float">
            <text:p>4</text:p>
          </table:table-cell>
          <table:table-cell office:value-type="string" calcext:value-type="string">
            <text:p>イジン</text:p>
          </table:table-cell>
          <table:table-cell table:formula="of:=VLOOKUP([.K318];[$種類番号.$A$1:$種類番号.$B$4];2;0)" office:value-type="float" office:value="1" calcext:value-type="float">
            <text:p>1</text:p>
          </table:table-cell>
          <table:table-cell office:value-type="string" calcext:value-type="string">
            <text:p>紫</text:p>
          </table:table-cell>
          <table:table-cell table:formula="of:=VLOOKUP([.M318];[$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8];[$特性番号.$A$1:$特性番号.$B$8];2;0);0)" office:value-type="float" office:value="0" calcext:value-type="float">
            <text:p>0</text:p>
          </table:table-cell>
          <table:table-cell office:value-type="string" calcext:value-type="string">
            <text:p>戦場に置かれたとき、相手の山札の上から5枚を墓地に置く。¶カードが墓地に30枚以上ある間「即応 モータル」を得る。</text:p>
          </table:table-cell>
          <table:table-cell table:style-name="ce8" table:formula="of:=NA()" office:value-type="string" office:string-value="" calcext:value-type="error">
            <text:p>#N/A</text:p>
          </table:table-cell>
          <table:table-cell table:formula="of:=IFERROR(VLOOKUP([.$V318];[$遺業能力番号.$A$1:$遺業能力番号.$B$9];2;0);0)" office:value-type="float" office:value="0" calcext:value-type="float">
            <text:p>0</text:p>
          </table:table-cell>
          <table:table-cell office:value-type="string" calcext:value-type="string">
            <text:p>https://one-draw.jp/ijinden/cardlist/004/card/04_009.png</text:p>
          </table:table-cell>
          <table:table-cell table:formula="of:=CONCATENATE([$JSON.$A$1];[.$C318];[$JSON.$B$1];[.$E318];[$JSON.$C$1];[.$F318];[$JSON.$D$1];IF(ISNA([.$S318]);&quot;null&quot;;&quot;&quot;&quot;&quot;&amp;[.$S318]&amp;&quot;&quot;&quot;&quot;);[$JSON.$E$1];[.$U318];[$JSON.$F$1];IF(ISNA([.$V318]);&quot;null&quot;;&quot;&quot;&quot;&quot;&amp;[.$V318]&amp;&quot;&quot;&quot;&quot;);[$JSON.$G$1];[.$X318];[$JSON.$H$1];[.$H318];[$JSON.$I$1];[.J318];[$JSON.$J$1];[.$L318];[$JSON.$K$1];[.$O318];[$JSON.$L$1];[.$N318];[$JSON.$M$1];[.$R318];[$JSON.$N$1];[.$T318];[$JSON.$O$1];[.$W318];[$JSON.$P$1];[.$A318];[$JSON.$Q$1];[.$B318];[$JSON.$R$1])" office:value-type="string" office:string-value="{&quot;id&quot;:&quot;4-9&quot;,&quot;name&quot;:&quot;レオニダス&quot;,&quot;kana&quot;:&quot;れおにだす&quot;,&quot;traitText&quot;:null,&quot;ruleText&quot;:&quot;戦場に置かれたとき、相手の山札の上から5枚を墓地に置く。¶カードが墓地に30枚以上ある間「即応 モータル」を得る。&quot;,&quot;legacyText&quot;:null,&quot;imageUrl&quot;:&quot;https://one-draw.jp/ijinden/cardlist/004/card/04_009.png&quot;,&quot;expansion&quot;:45,&quot;rarity&quot;:4,&quot;type&quot;:1,&quot;level&quot;:5,&quot;color&quot;:16,&quot;term&quot;:0,&quot;trait&quot;:0,&quot;legacy&quot;:0,&quot;orderTable&quot;:318,&quot;orderDeck&quot;:178}," calcext:value-type="string">
            <text:p>{"id":"4-9","name":"レオニダス","kana":"れおにだす","traitText":null,"ruleText":"戦場に置かれたとき、相手の山札の上から5枚を墓地に置く。¶カードが墓地に30枚以上ある間「即応 モータル」を得る。","legacyText":null,"imageUrl":"https://one-draw.jp/ijinden/cardlist/004/card/04_009.png","expansion":45,"rarity":4,"type":1,"level":5,"color":16,"term":0,"trait":0,"legacy":0,"orderTable":318,"orderDeck":178},</text:p>
          </table:table-cell>
          <table:table-cell table:number-columns-repeated="16347"/>
        </table:table-row>
        <table:table-row table:style-name="ro2">
          <table:table-cell office:value-type="float" office:value="319" calcext:value-type="float">
            <text:p>319</text:p>
          </table:table-cell>
          <table:table-cell office:value-type="float" office:value="235" calcext:value-type="float">
            <text:p>235</text:p>
          </table:table-cell>
          <table:table-cell office:value-type="string" calcext:value-type="string">
            <text:p>4-10</text:p>
          </table:table-cell>
          <table:table-cell office:value-type="float" office:value="10" calcext:value-type="float">
            <text:p>10</text:p>
          </table:table-cell>
          <table:table-cell office:value-type="string" calcext:value-type="string">
            <text:p>カール大帝</text:p>
          </table:table-cell>
          <table:table-cell office:value-type="string" calcext:value-type="string">
            <text:p>かーるたいてい</text:p>
          </table:table-cell>
          <table:table-cell office:value-type="string" calcext:value-type="string">
            <text:p>第４弾ブースターパック</text:p>
          </table:table-cell>
          <table:table-cell table:formula="of:=VLOOKUP([.G319];[$収録番号.$A$1:$収録番号.$B$9];2;0)" office:value-type="float" office:value="45" calcext:value-type="float">
            <text:p>45</text:p>
          </table:table-cell>
          <table:table-cell office:value-type="string" calcext:value-type="string">
            <text:p>SR</text:p>
          </table:table-cell>
          <table:table-cell table:formula="of:=VLOOKUP([.I319];[$レアリティ番号.$A$1:$レアリティ番号.$B$4];2;0)" office:value-type="float" office:value="4" calcext:value-type="float">
            <text:p>4</text:p>
          </table:table-cell>
          <table:table-cell office:value-type="string" calcext:value-type="string">
            <text:p>イジン</text:p>
          </table:table-cell>
          <table:table-cell table:formula="of:=VLOOKUP([.K319];[$種類番号.$A$1:$種類番号.$B$4];2;0)" office:value-type="float" office:value="1" calcext:value-type="float">
            <text:p>1</text:p>
          </table:table-cell>
          <table:table-cell office:value-type="string" calcext:value-type="string">
            <text:p>紫</text:p>
          </table:table-cell>
          <table:table-cell table:formula="of:=VLOOKUP([.M319];[$色番号.$A$1:$色番号.$B$10];2;0)" office:value-type="float" office:value="16" calcext:value-type="float">
            <text:p>16</text:p>
          </table:table-cell>
          <table:table-cell office:value-type="float" office:value="10" calcext:value-type="float">
            <text:p>1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9];[$特性番号.$A$1:$特性番号.$B$8];2;0);0)" office:value-type="float" office:value="0" calcext:value-type="float">
            <text:p>0</text:p>
          </table:table-cell>
          <table:table-cell office:value-type="string" calcext:value-type="string">
            <text:p>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text:p>
          </table:table-cell>
          <table:table-cell table:style-name="ce8" table:formula="of:=NA()" office:value-type="string" office:string-value="" calcext:value-type="error">
            <text:p>#N/A</text:p>
          </table:table-cell>
          <table:table-cell table:formula="of:=IFERROR(VLOOKUP([.$V319];[$遺業能力番号.$A$1:$遺業能力番号.$B$9];2;0);0)" office:value-type="float" office:value="0" calcext:value-type="float">
            <text:p>0</text:p>
          </table:table-cell>
          <table:table-cell office:value-type="string" calcext:value-type="string">
            <text:p>https://one-draw.jp/ijinden/cardlist/004/card/04_010.png</text:p>
          </table:table-cell>
          <table:table-cell table:formula="of:=CONCATENATE([$JSON.$A$1];[.$C319];[$JSON.$B$1];[.$E319];[$JSON.$C$1];[.$F319];[$JSON.$D$1];IF(ISNA([.$S319]);&quot;null&quot;;&quot;&quot;&quot;&quot;&amp;[.$S319]&amp;&quot;&quot;&quot;&quot;);[$JSON.$E$1];[.$U319];[$JSON.$F$1];IF(ISNA([.$V319]);&quot;null&quot;;&quot;&quot;&quot;&quot;&amp;[.$V319]&amp;&quot;&quot;&quot;&quot;);[$JSON.$G$1];[.$X319];[$JSON.$H$1];[.$H319];[$JSON.$I$1];[.J319];[$JSON.$J$1];[.$L319];[$JSON.$K$1];[.$O319];[$JSON.$L$1];[.$N319];[$JSON.$M$1];[.$R319];[$JSON.$N$1];[.$T319];[$JSON.$O$1];[.$W319];[$JSON.$P$1];[.$A319];[$JSON.$Q$1];[.$B319];[$JSON.$R$1])" office:value-type="string" office:string-value="{&quot;id&quot;:&quot;4-10&quot;,&quot;name&quot;:&quot;カール大帝&quot;,&quot;kana&quot;:&quot;かーるたいてい&quot;,&quot;traitText&quot;:null,&quot;ruleText&quot;:&quo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quot;,&quot;legacyText&quot;:null,&quot;imageUrl&quot;:&quot;https://one-draw.jp/ijinden/cardlist/004/card/04_010.png&quot;,&quot;expansion&quot;:45,&quot;rarity&quot;:4,&quot;type&quot;:1,&quot;level&quot;:10,&quot;color&quot;:16,&quot;term&quot;:0,&quot;trait&quot;:0,&quot;legacy&quot;:0,&quot;orderTable&quot;:319,&quot;orderDeck&quot;:235}," calcext:value-type="string">
            <text:p>{"id":"4-10","name":"カール大帝","kana":"かーるたいてい","traitText":null,"ruleTex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legacyText":null,"imageUrl":"https://one-draw.jp/ijinden/cardlist/004/card/04_010.png","expansion":45,"rarity":4,"type":1,"level":10,"color":16,"term":0,"trait":0,"legacy":0,"orderTable":319,"orderDeck":235},</text:p>
          </table:table-cell>
          <table:table-cell table:number-columns-repeated="16347"/>
        </table:table-row>
        <table:table-row table:style-name="ro2">
          <table:table-cell office:value-type="float" office:value="320" calcext:value-type="float">
            <text:p>320</text:p>
          </table:table-cell>
          <table:table-cell office:value-type="float" office:value="113" calcext:value-type="float">
            <text:p>113</text:p>
          </table:table-cell>
          <table:table-cell office:value-type="string" calcext:value-type="string">
            <text:p>4-11</text:p>
          </table:table-cell>
          <table:table-cell office:value-type="float" office:value="11" calcext:value-type="float">
            <text:p>11</text:p>
          </table:table-cell>
          <table:table-cell office:value-type="string" calcext:value-type="string">
            <text:p>島津斉彬</text:p>
          </table:table-cell>
          <table:table-cell office:value-type="string" calcext:value-type="string">
            <text:p>しまづなりあきら</text:p>
          </table:table-cell>
          <table:table-cell office:value-type="string" calcext:value-type="string">
            <text:p>第４弾ブースターパック</text:p>
          </table:table-cell>
          <table:table-cell table:formula="of:=VLOOKUP([.G320];[$収録番号.$A$1:$収録番号.$B$9];2;0)" office:value-type="float" office:value="45" calcext:value-type="float">
            <text:p>45</text:p>
          </table:table-cell>
          <table:table-cell office:value-type="string" calcext:value-type="string">
            <text:p>N</text:p>
          </table:table-cell>
          <table:table-cell table:formula="of:=VLOOKUP([.I320];[$レアリティ番号.$A$1:$レアリティ番号.$B$4];2;0)" office:value-type="float" office:value="1" calcext:value-type="float">
            <text:p>1</text:p>
          </table:table-cell>
          <table:table-cell office:value-type="string" calcext:value-type="string">
            <text:p>イジン</text:p>
          </table:table-cell>
          <table:table-cell table:formula="of:=VLOOKUP([.K320];[$種類番号.$A$1:$種類番号.$B$4];2;0)" office:value-type="float" office:value="1" calcext:value-type="float">
            <text:p>1</text:p>
          </table:table-cell>
          <table:table-cell office:value-type="string" calcext:value-type="string">
            <text:p>赤</text:p>
          </table:table-cell>
          <table:table-cell table:formula="of:=VLOOKUP([.M320];[$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0];[$特性番号.$A$1:$特性番号.$B$8];2;0);0)" office:value-type="float" office:value="0" calcext:value-type="float">
            <text:p>0</text:p>
          </table:table-cell>
          <table:table-cell office:value-type="string" calcext:value-type="string">
            <text:p>これのイジン召喚に際し、これのレベルは、相手の戦場の起きているイジン1体につき1だけ下がる。¶戦場に置かれたとき、イジン召喚権+1する。</text:p>
          </table:table-cell>
          <table:table-cell table:style-name="ce8" office:value-type="string" calcext:value-type="string">
            <text:p>1ドローする</text:p>
          </table:table-cell>
          <table:table-cell table:formula="of:=IFERROR(VLOOKUP([.$V320];[$遺業能力番号.$A$1:$遺業能力番号.$B$9];2;0);0)" office:value-type="float" office:value="4" calcext:value-type="float">
            <text:p>4</text:p>
          </table:table-cell>
          <table:table-cell office:value-type="string" calcext:value-type="string">
            <text:p>https://one-draw.jp/ijinden/cardlist/004/card/04_011.png</text:p>
          </table:table-cell>
          <table:table-cell table:formula="of:=CONCATENATE([$JSON.$A$1];[.$C320];[$JSON.$B$1];[.$E320];[$JSON.$C$1];[.$F320];[$JSON.$D$1];IF(ISNA([.$S320]);&quot;null&quot;;&quot;&quot;&quot;&quot;&amp;[.$S320]&amp;&quot;&quot;&quot;&quot;);[$JSON.$E$1];[.$U320];[$JSON.$F$1];IF(ISNA([.$V320]);&quot;null&quot;;&quot;&quot;&quot;&quot;&amp;[.$V320]&amp;&quot;&quot;&quot;&quot;);[$JSON.$G$1];[.$X320];[$JSON.$H$1];[.$H320];[$JSON.$I$1];[.J320];[$JSON.$J$1];[.$L320];[$JSON.$K$1];[.$O320];[$JSON.$L$1];[.$N320];[$JSON.$M$1];[.$R320];[$JSON.$N$1];[.$T320];[$JSON.$O$1];[.$W320];[$JSON.$P$1];[.$A320];[$JSON.$Q$1];[.$B320];[$JSON.$R$1])" office:value-type="string" office:string-value="{&quot;id&quot;:&quot;4-11&quot;,&quot;name&quot;:&quot;島津斉彬&quot;,&quot;kana&quot;:&quot;しまづなりあきら&quot;,&quot;traitText&quot;:null,&quot;ruleText&quot;:&quot;これのイジン召喚に際し、これのレベルは、相手の戦場の起きているイジン1体につき1だけ下がる。¶戦場に置かれたとき、イジン召喚権+1する。&quot;,&quot;legacyText&quot;:&quot;1ドローする&quot;,&quot;imageUrl&quot;:&quot;https://one-draw.jp/ijinden/cardlist/004/card/04_011.png&quot;,&quot;expansion&quot;:45,&quot;rarity&quot;:1,&quot;type&quot;:1,&quot;level&quot;:4,&quot;color&quot;:1,&quot;term&quot;:0,&quot;trait&quot;:0,&quot;legacy&quot;:4,&quot;orderTable&quot;:320,&quot;orderDeck&quot;:113}," calcext:value-type="string">
            <text:p>{"id":"4-11","name":"島津斉彬","kana":"しまづなりあきら","traitText":null,"ruleText":"これのイジン召喚に際し、これのレベルは、相手の戦場の起きているイジン1体につき1だけ下がる。¶戦場に置かれたとき、イジン召喚権+1する。","legacyText":"1ドローする","imageUrl":"https://one-draw.jp/ijinden/cardlist/004/card/04_011.png","expansion":45,"rarity":1,"type":1,"level":4,"color":1,"term":0,"trait":0,"legacy":4,"orderTable":320,"orderDeck":113},</text:p>
          </table:table-cell>
          <table:table-cell table:number-columns-repeated="16347"/>
        </table:table-row>
        <table:table-row table:style-name="ro2">
          <table:table-cell office:value-type="float" office:value="321" calcext:value-type="float">
            <text:p>321</text:p>
          </table:table-cell>
          <table:table-cell office:value-type="float" office:value="30" calcext:value-type="float">
            <text:p>30</text:p>
          </table:table-cell>
          <table:table-cell office:value-type="string" calcext:value-type="string">
            <text:p>4-12</text:p>
          </table:table-cell>
          <table:table-cell office:value-type="float" office:value="12" calcext:value-type="float">
            <text:p>12</text:p>
          </table:table-cell>
          <table:table-cell office:value-type="string" calcext:value-type="string">
            <text:p>島津久光</text:p>
          </table:table-cell>
          <table:table-cell office:value-type="string" calcext:value-type="string">
            <text:p>しまづひさみつ</text:p>
          </table:table-cell>
          <table:table-cell office:value-type="string" calcext:value-type="string">
            <text:p>第４弾ブースターパック</text:p>
          </table:table-cell>
          <table:table-cell table:formula="of:=VLOOKUP([.G321];[$収録番号.$A$1:$収録番号.$B$9];2;0)" office:value-type="float" office:value="45" calcext:value-type="float">
            <text:p>45</text:p>
          </table:table-cell>
          <table:table-cell office:value-type="string" calcext:value-type="string">
            <text:p>N</text:p>
          </table:table-cell>
          <table:table-cell table:formula="of:=VLOOKUP([.I321];[$レアリティ番号.$A$1:$レアリティ番号.$B$4];2;0)" office:value-type="float" office:value="1" calcext:value-type="float">
            <text:p>1</text:p>
          </table:table-cell>
          <table:table-cell office:value-type="string" calcext:value-type="string">
            <text:p>イジン</text:p>
          </table:table-cell>
          <table:table-cell table:formula="of:=VLOOKUP([.K321];[$種類番号.$A$1:$種類番号.$B$4];2;0)" office:value-type="float" office:value="1" calcext:value-type="float">
            <text:p>1</text:p>
          </table:table-cell>
          <table:table-cell office:value-type="string" calcext:value-type="string">
            <text:p>赤</text:p>
          </table:table-cell>
          <table:table-cell table:formula="of:=VLOOKUP([.M321];[$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1];[$特性番号.$A$1:$特性番号.$B$8];2;0);0)" office:value-type="float" office:value="0" calcext:value-type="float">
            <text:p>0</text:p>
          </table:table-cell>
          <table:table-cell office:value-type="string" calcext:value-type="string">
            <text:p>この能力はターンに1回しか発動しない。赤でないイジンが戦場に置かれたとき、1ドローする。¶アタック+2000</text:p>
          </table:table-cell>
          <table:table-cell table:style-name="ce8" office:value-type="string" calcext:value-type="string">
            <text:p>1ドローする</text:p>
          </table:table-cell>
          <table:table-cell table:formula="of:=IFERROR(VLOOKUP([.$V321];[$遺業能力番号.$A$1:$遺業能力番号.$B$9];2;0);0)" office:value-type="float" office:value="4" calcext:value-type="float">
            <text:p>4</text:p>
          </table:table-cell>
          <table:table-cell office:value-type="string" calcext:value-type="string">
            <text:p>https://one-draw.jp/ijinden/cardlist/004/card/04_012.png</text:p>
          </table:table-cell>
          <table:table-cell table:formula="of:=CONCATENATE([$JSON.$A$1];[.$C321];[$JSON.$B$1];[.$E321];[$JSON.$C$1];[.$F321];[$JSON.$D$1];IF(ISNA([.$S321]);&quot;null&quot;;&quot;&quot;&quot;&quot;&amp;[.$S321]&amp;&quot;&quot;&quot;&quot;);[$JSON.$E$1];[.$U321];[$JSON.$F$1];IF(ISNA([.$V321]);&quot;null&quot;;&quot;&quot;&quot;&quot;&amp;[.$V321]&amp;&quot;&quot;&quot;&quot;);[$JSON.$G$1];[.$X321];[$JSON.$H$1];[.$H321];[$JSON.$I$1];[.J321];[$JSON.$J$1];[.$L321];[$JSON.$K$1];[.$O321];[$JSON.$L$1];[.$N321];[$JSON.$M$1];[.$R321];[$JSON.$N$1];[.$T321];[$JSON.$O$1];[.$W321];[$JSON.$P$1];[.$A321];[$JSON.$Q$1];[.$B321];[$JSON.$R$1])" office:value-type="string" office:string-value="{&quot;id&quot;:&quot;4-12&quot;,&quot;name&quot;:&quot;島津久光&quot;,&quot;kana&quot;:&quot;しまづひさみつ&quot;,&quot;traitText&quot;:null,&quot;ruleText&quot;:&quot;この能力はターンに1回しか発動しない。赤でないイジンが戦場に置かれたとき、1ドローする。¶アタック+2000&quot;,&quot;legacyText&quot;:&quot;1ドローする&quot;,&quot;imageUrl&quot;:&quot;https://one-draw.jp/ijinden/cardlist/004/card/04_012.png&quot;,&quot;expansion&quot;:45,&quot;rarity&quot;:1,&quot;type&quot;:1,&quot;level&quot;:2,&quot;color&quot;:1,&quot;term&quot;:0,&quot;trait&quot;:0,&quot;legacy&quot;:4,&quot;orderTable&quot;:321,&quot;orderDeck&quot;:30}," calcext:value-type="string">
            <text:p>{"id":"4-12","name":"島津久光","kana":"しまづひさみつ","traitText":null,"ruleText":"この能力はターンに1回しか発動しない。赤でないイジンが戦場に置かれたとき、1ドローする。¶アタック+2000","legacyText":"1ドローする","imageUrl":"https://one-draw.jp/ijinden/cardlist/004/card/04_012.png","expansion":45,"rarity":1,"type":1,"level":2,"color":1,"term":0,"trait":0,"legacy":4,"orderTable":321,"orderDeck":30},</text:p>
          </table:table-cell>
          <table:table-cell table:number-columns-repeated="16347"/>
        </table:table-row>
        <table:table-row table:style-name="ro2">
          <table:table-cell office:value-type="float" office:value="322" calcext:value-type="float">
            <text:p>322</text:p>
          </table:table-cell>
          <table:table-cell office:value-type="float" office:value="152" calcext:value-type="float">
            <text:p>152</text:p>
          </table:table-cell>
          <table:table-cell office:value-type="string" calcext:value-type="string">
            <text:p>4-13</text:p>
          </table:table-cell>
          <table:table-cell office:value-type="float" office:value="13" calcext:value-type="float">
            <text:p>13</text:p>
          </table:table-cell>
          <table:table-cell office:value-type="string" calcext:value-type="string">
            <text:p>大久保利通</text:p>
          </table:table-cell>
          <table:table-cell office:value-type="string" calcext:value-type="string">
            <text:p>おおくぼとしみち</text:p>
          </table:table-cell>
          <table:table-cell office:value-type="string" calcext:value-type="string">
            <text:p>第４弾ブースターパック</text:p>
          </table:table-cell>
          <table:table-cell table:formula="of:=VLOOKUP([.G322];[$収録番号.$A$1:$収録番号.$B$9];2;0)" office:value-type="float" office:value="45" calcext:value-type="float">
            <text:p>45</text:p>
          </table:table-cell>
          <table:table-cell office:value-type="string" calcext:value-type="string">
            <text:p>N</text:p>
          </table:table-cell>
          <table:table-cell table:formula="of:=VLOOKUP([.I322];[$レアリティ番号.$A$1:$レアリティ番号.$B$4];2;0)" office:value-type="float" office:value="1" calcext:value-type="float">
            <text:p>1</text:p>
          </table:table-cell>
          <table:table-cell office:value-type="string" calcext:value-type="string">
            <text:p>イジン</text:p>
          </table:table-cell>
          <table:table-cell table:formula="of:=VLOOKUP([.K322];[$種類番号.$A$1:$種類番号.$B$4];2;0)" office:value-type="float" office:value="1" calcext:value-type="float">
            <text:p>1</text:p>
          </table:table-cell>
          <table:table-cell office:value-type="string" calcext:value-type="string">
            <text:p>赤</text:p>
          </table:table-cell>
          <table:table-cell table:formula="of:=VLOOKUP([.M322];[$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2];[$特性番号.$A$1:$特性番号.$B$8];2;0);0)" office:value-type="float" office:value="0" calcext:value-type="float">
            <text:p>0</text:p>
          </table:table-cell>
          <table:table-cell office:value-type="string" calcext:value-type="string">
            <text:p>自分がイジン1体だけでアタックしたとき、そのイジンがレベル6以上なら発動する。アタッカーすべては、このターンに限り「イジンにブロックされない」を得る。</text:p>
          </table:table-cell>
          <table:table-cell table:style-name="ce8" table:formula="of:=NA()" office:value-type="string" office:string-value="" calcext:value-type="error">
            <text:p>#N/A</text:p>
          </table:table-cell>
          <table:table-cell table:formula="of:=IFERROR(VLOOKUP([.$V322];[$遺業能力番号.$A$1:$遺業能力番号.$B$9];2;0);0)" office:value-type="float" office:value="0" calcext:value-type="float">
            <text:p>0</text:p>
          </table:table-cell>
          <table:table-cell office:value-type="string" calcext:value-type="string">
            <text:p>https://one-draw.jp/ijinden/cardlist/004/card/04_013.png</text:p>
          </table:table-cell>
          <table:table-cell table:formula="of:=CONCATENATE([$JSON.$A$1];[.$C322];[$JSON.$B$1];[.$E322];[$JSON.$C$1];[.$F322];[$JSON.$D$1];IF(ISNA([.$S322]);&quot;null&quot;;&quot;&quot;&quot;&quot;&amp;[.$S322]&amp;&quot;&quot;&quot;&quot;);[$JSON.$E$1];[.$U322];[$JSON.$F$1];IF(ISNA([.$V322]);&quot;null&quot;;&quot;&quot;&quot;&quot;&amp;[.$V322]&amp;&quot;&quot;&quot;&quot;);[$JSON.$G$1];[.$X322];[$JSON.$H$1];[.$H322];[$JSON.$I$1];[.J322];[$JSON.$J$1];[.$L322];[$JSON.$K$1];[.$O322];[$JSON.$L$1];[.$N322];[$JSON.$M$1];[.$R322];[$JSON.$N$1];[.$T322];[$JSON.$O$1];[.$W322];[$JSON.$P$1];[.$A322];[$JSON.$Q$1];[.$B322];[$JSON.$R$1])" office:value-type="string" office:string-value="{&quot;id&quot;:&quot;4-13&quot;,&quot;name&quot;:&quot;大久保利通&quot;,&quot;kana&quot;:&quot;おおくぼとしみち&quot;,&quot;traitText&quot;:null,&quot;ruleText&quot;:&quot;自分がイジン1体だけでアタックしたとき、そのイジンがレベル6以上なら発動する。アタッカーすべては、このターンに限り「イジンにブロックされない」を得る。&quot;,&quot;legacyText&quot;:null,&quot;imageUrl&quot;:&quot;https://one-draw.jp/ijinden/cardlist/004/card/04_013.png&quot;,&quot;expansion&quot;:45,&quot;rarity&quot;:1,&quot;type&quot;:1,&quot;level&quot;:5,&quot;color&quot;:1,&quot;term&quot;:0,&quot;trait&quot;:0,&quot;legacy&quot;:0,&quot;orderTable&quot;:322,&quot;orderDeck&quot;:152}," calcext:value-type="string">
            <text:p>{"id":"4-13","name":"大久保利通","kana":"おおくぼとしみち","traitText":null,"ruleText":"自分がイジン1体だけでアタックしたとき、そのイジンがレベル6以上なら発動する。アタッカーすべては、このターンに限り「イジンにブロックされない」を得る。","legacyText":null,"imageUrl":"https://one-draw.jp/ijinden/cardlist/004/card/04_013.png","expansion":45,"rarity":1,"type":1,"level":5,"color":1,"term":0,"trait":0,"legacy":0,"orderTable":322,"orderDeck":152},</text:p>
          </table:table-cell>
          <table:table-cell table:number-columns-repeated="16347"/>
        </table:table-row>
        <table:table-row table:style-name="ro2">
          <table:table-cell office:value-type="float" office:value="323" calcext:value-type="float">
            <text:p>323</text:p>
          </table:table-cell>
          <table:table-cell office:value-type="float" office:value="153" calcext:value-type="float">
            <text:p>153</text:p>
          </table:table-cell>
          <table:table-cell office:value-type="string" calcext:value-type="string">
            <text:p>4-14</text:p>
          </table:table-cell>
          <table:table-cell office:value-type="float" office:value="14" calcext:value-type="float">
            <text:p>14</text:p>
          </table:table-cell>
          <table:table-cell office:value-type="string" calcext:value-type="string">
            <text:p>ジェームズ・ハーグリーブズ</text:p>
          </table:table-cell>
          <table:table-cell office:value-type="string" calcext:value-type="string">
            <text:p>じぇーむずはーぐりーぶず</text:p>
          </table:table-cell>
          <table:table-cell office:value-type="string" calcext:value-type="string">
            <text:p>第４弾ブースターパック</text:p>
          </table:table-cell>
          <table:table-cell table:formula="of:=VLOOKUP([.G323];[$収録番号.$A$1:$収録番号.$B$9];2;0)" office:value-type="float" office:value="45" calcext:value-type="float">
            <text:p>45</text:p>
          </table:table-cell>
          <table:table-cell office:value-type="string" calcext:value-type="string">
            <text:p>N</text:p>
          </table:table-cell>
          <table:table-cell table:formula="of:=VLOOKUP([.I323];[$レアリティ番号.$A$1:$レアリティ番号.$B$4];2;0)" office:value-type="float" office:value="1" calcext:value-type="float">
            <text:p>1</text:p>
          </table:table-cell>
          <table:table-cell office:value-type="string" calcext:value-type="string">
            <text:p>イジン</text:p>
          </table:table-cell>
          <table:table-cell table:formula="of:=VLOOKUP([.K323];[$種類番号.$A$1:$種類番号.$B$4];2;0)" office:value-type="float" office:value="1" calcext:value-type="float">
            <text:p>1</text:p>
          </table:table-cell>
          <table:table-cell office:value-type="string" calcext:value-type="string">
            <text:p>赤</text:p>
          </table:table-cell>
          <table:table-cell table:formula="of:=VLOOKUP([.M323];[$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3];[$特性番号.$A$1:$特性番号.$B$8];2;0);0)" office:value-type="float" office:value="0" calcext:value-type="float">
            <text:p>0</text:p>
          </table:table-cell>
          <table:table-cell office:value-type="string" calcext:value-type="string">
            <text:p>これのイジン召喚に際し、自分の魔力ゾーンに裏のカードがないなら、これは「レベル3」になる。¶戦場に置かれたとき、魔力ゾーンの裏のカード1つを手札に戻す。</text:p>
          </table:table-cell>
          <table:table-cell table:style-name="ce8" table:formula="of:=NA()" office:value-type="string" office:string-value="" calcext:value-type="error">
            <text:p>#N/A</text:p>
          </table:table-cell>
          <table:table-cell table:formula="of:=IFERROR(VLOOKUP([.$V323];[$遺業能力番号.$A$1:$遺業能力番号.$B$9];2;0);0)" office:value-type="float" office:value="0" calcext:value-type="float">
            <text:p>0</text:p>
          </table:table-cell>
          <table:table-cell office:value-type="string" calcext:value-type="string">
            <text:p>https://one-draw.jp/ijinden/cardlist/004/card/04_014.png</text:p>
          </table:table-cell>
          <table:table-cell table:formula="of:=CONCATENATE([$JSON.$A$1];[.$C323];[$JSON.$B$1];[.$E323];[$JSON.$C$1];[.$F323];[$JSON.$D$1];IF(ISNA([.$S323]);&quot;null&quot;;&quot;&quot;&quot;&quot;&amp;[.$S323]&amp;&quot;&quot;&quot;&quot;);[$JSON.$E$1];[.$U323];[$JSON.$F$1];IF(ISNA([.$V323]);&quot;null&quot;;&quot;&quot;&quot;&quot;&amp;[.$V323]&amp;&quot;&quot;&quot;&quot;);[$JSON.$G$1];[.$X323];[$JSON.$H$1];[.$H323];[$JSON.$I$1];[.J323];[$JSON.$J$1];[.$L323];[$JSON.$K$1];[.$O323];[$JSON.$L$1];[.$N323];[$JSON.$M$1];[.$R323];[$JSON.$N$1];[.$T323];[$JSON.$O$1];[.$W323];[$JSON.$P$1];[.$A323];[$JSON.$Q$1];[.$B323];[$JSON.$R$1])" office:value-type="string" office:string-value="{&quot;id&quot;:&quot;4-14&quot;,&quot;name&quot;:&quot;ジェームズ・ハーグリーブズ&quot;,&quot;kana&quot;:&quot;じぇーむずはーぐりーぶず&quot;,&quot;traitText&quot;:null,&quot;ruleText&quot;:&quot;これのイジン召喚に際し、自分の魔力ゾーンに裏のカードがないなら、これは「レベル3」になる。¶戦場に置かれたとき、魔力ゾーンの裏のカード1つを手札に戻す。&quot;,&quot;legacyText&quot;:null,&quot;imageUrl&quot;:&quot;https://one-draw.jp/ijinden/cardlist/004/card/04_014.png&quot;,&quot;expansion&quot;:45,&quot;rarity&quot;:1,&quot;type&quot;:1,&quot;level&quot;:5,&quot;color&quot;:1,&quot;term&quot;:0,&quot;trait&quot;:0,&quot;legacy&quot;:0,&quot;orderTable&quot;:323,&quot;orderDeck&quot;:153}," calcext:value-type="string">
            <text:p>{"id":"4-14","name":"ジェームズ・ハーグリーブズ","kana":"じぇーむずはーぐりーぶず","traitText":null,"ruleText":"これのイジン召喚に際し、自分の魔力ゾーンに裏のカードがないなら、これは「レベル3」になる。¶戦場に置かれたとき、魔力ゾーンの裏のカード1つを手札に戻す。","legacyText":null,"imageUrl":"https://one-draw.jp/ijinden/cardlist/004/card/04_014.png","expansion":45,"rarity":1,"type":1,"level":5,"color":1,"term":0,"trait":0,"legacy":0,"orderTable":323,"orderDeck":153},</text:p>
          </table:table-cell>
          <table:table-cell table:number-columns-repeated="16347"/>
        </table:table-row>
        <table:table-row table:style-name="ro2">
          <table:table-cell office:value-type="float" office:value="324" calcext:value-type="float">
            <text:p>324</text:p>
          </table:table-cell>
          <table:table-cell office:value-type="float" office:value="31" calcext:value-type="float">
            <text:p>31</text:p>
          </table:table-cell>
          <table:table-cell office:value-type="string" calcext:value-type="string">
            <text:p>4-15</text:p>
          </table:table-cell>
          <table:table-cell office:value-type="float" office:value="15" calcext:value-type="float">
            <text:p>15</text:p>
          </table:table-cell>
          <table:table-cell table:number-columns-repeated="2" office:value-type="string" calcext:value-type="string">
            <text:p>ねね</text:p>
          </table:table-cell>
          <table:table-cell office:value-type="string" calcext:value-type="string">
            <text:p>第４弾ブースターパック</text:p>
          </table:table-cell>
          <table:table-cell table:formula="of:=VLOOKUP([.G324];[$収録番号.$A$1:$収録番号.$B$9];2;0)" office:value-type="float" office:value="45" calcext:value-type="float">
            <text:p>45</text:p>
          </table:table-cell>
          <table:table-cell office:value-type="string" calcext:value-type="string">
            <text:p>R</text:p>
          </table:table-cell>
          <table:table-cell table:formula="of:=VLOOKUP([.I324];[$レアリティ番号.$A$1:$レアリティ番号.$B$4];2;0)" office:value-type="float" office:value="2" calcext:value-type="float">
            <text:p>2</text:p>
          </table:table-cell>
          <table:table-cell office:value-type="string" calcext:value-type="string">
            <text:p>イジン</text:p>
          </table:table-cell>
          <table:table-cell table:formula="of:=VLOOKUP([.K324];[$種類番号.$A$1:$種類番号.$B$4];2;0)" office:value-type="float" office:value="1" calcext:value-type="float">
            <text:p>1</text:p>
          </table:table-cell>
          <table:table-cell office:value-type="string" calcext:value-type="string">
            <text:p>赤</text:p>
          </table:table-cell>
          <table:table-cell table:formula="of:=VLOOKUP([.M324];[$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4];[$特性番号.$A$1:$特性番号.$B$8];2;0);0)" office:value-type="float" office:value="0" calcext:value-type="float">
            <text:p>0</text:p>
          </table:table-cell>
          <table:table-cell office:value-type="string" calcext:value-type="string">
            <text:p>自分のメインフェイズが開始したとき、自分の手札のレベル5以下の赤のイジン1体を指定して発動できる。そのイジンを戦場に置いて、これを手札に戻す。</text:p>
          </table:table-cell>
          <table:table-cell table:style-name="ce8" office:value-type="string" calcext:value-type="string">
            <text:p>反魂</text:p>
          </table:table-cell>
          <table:table-cell table:formula="of:=IFERROR(VLOOKUP([.$V324];[$遺業能力番号.$A$1:$遺業能力番号.$B$9];2;0);0)" office:value-type="float" office:value="6" calcext:value-type="float">
            <text:p>6</text:p>
          </table:table-cell>
          <table:table-cell office:value-type="string" calcext:value-type="string">
            <text:p>https://one-draw.jp/ijinden/cardlist/004/card/04_015.png</text:p>
          </table:table-cell>
          <table:table-cell table:formula="of:=CONCATENATE([$JSON.$A$1];[.$C324];[$JSON.$B$1];[.$E324];[$JSON.$C$1];[.$F324];[$JSON.$D$1];IF(ISNA([.$S324]);&quot;null&quot;;&quot;&quot;&quot;&quot;&amp;[.$S324]&amp;&quot;&quot;&quot;&quot;);[$JSON.$E$1];[.$U324];[$JSON.$F$1];IF(ISNA([.$V324]);&quot;null&quot;;&quot;&quot;&quot;&quot;&amp;[.$V324]&amp;&quot;&quot;&quot;&quot;);[$JSON.$G$1];[.$X324];[$JSON.$H$1];[.$H324];[$JSON.$I$1];[.J324];[$JSON.$J$1];[.$L324];[$JSON.$K$1];[.$O324];[$JSON.$L$1];[.$N324];[$JSON.$M$1];[.$R324];[$JSON.$N$1];[.$T324];[$JSON.$O$1];[.$W324];[$JSON.$P$1];[.$A324];[$JSON.$Q$1];[.$B324];[$JSON.$R$1])" office:value-type="string" office:string-value="{&quot;id&quot;:&quot;4-15&quot;,&quot;name&quot;:&quot;ねね&quot;,&quot;kana&quot;:&quot;ねね&quot;,&quot;traitText&quot;:null,&quot;ruleText&quot;:&quot;自分のメインフェイズが開始したとき、自分の手札のレベル5以下の赤のイジン1体を指定して発動できる。そのイジンを戦場に置いて、これを手札に戻す。&quot;,&quot;legacyText&quot;:&quot;反魂&quot;,&quot;imageUrl&quot;:&quot;https://one-draw.jp/ijinden/cardlist/004/card/04_015.png&quot;,&quot;expansion&quot;:45,&quot;rarity&quot;:2,&quot;type&quot;:1,&quot;level&quot;:2,&quot;color&quot;:1,&quot;term&quot;:0,&quot;trait&quot;:0,&quot;legacy&quot;:6,&quot;orderTable&quot;:324,&quot;orderDeck&quot;:31}," calcext:value-type="string">
            <text:p>{"id":"4-15","name":"ねね","kana":"ねね","traitText":null,"ruleText":"自分のメインフェイズが開始したとき、自分の手札のレベル5以下の赤のイジン1体を指定して発動できる。そのイジンを戦場に置いて、これを手札に戻す。","legacyText":"反魂","imageUrl":"https://one-draw.jp/ijinden/cardlist/004/card/04_015.png","expansion":45,"rarity":2,"type":1,"level":2,"color":1,"term":0,"trait":0,"legacy":6,"orderTable":324,"orderDeck":31},</text:p>
          </table:table-cell>
          <table:table-cell table:number-columns-repeated="16347"/>
        </table:table-row>
        <table:table-row table:style-name="ro2">
          <table:table-cell office:value-type="float" office:value="325" calcext:value-type="float">
            <text:p>325</text:p>
          </table:table-cell>
          <table:table-cell office:value-type="float" office:value="185" calcext:value-type="float">
            <text:p>185</text:p>
          </table:table-cell>
          <table:table-cell office:value-type="string" calcext:value-type="string">
            <text:p>4-16</text:p>
          </table:table-cell>
          <table:table-cell office:value-type="float" office:value="16" calcext:value-type="float">
            <text:p>16</text:p>
          </table:table-cell>
          <table:table-cell office:value-type="string" calcext:value-type="string">
            <text:p>源為朝</text:p>
          </table:table-cell>
          <table:table-cell office:value-type="string" calcext:value-type="string">
            <text:p>みなもとのためとも</text:p>
          </table:table-cell>
          <table:table-cell office:value-type="string" calcext:value-type="string">
            <text:p>第４弾ブースターパック</text:p>
          </table:table-cell>
          <table:table-cell table:formula="of:=VLOOKUP([.G325];[$収録番号.$A$1:$収録番号.$B$9];2;0)" office:value-type="float" office:value="45" calcext:value-type="float">
            <text:p>45</text:p>
          </table:table-cell>
          <table:table-cell office:value-type="string" calcext:value-type="string">
            <text:p>R</text:p>
          </table:table-cell>
          <table:table-cell table:formula="of:=VLOOKUP([.I325];[$レアリティ番号.$A$1:$レアリティ番号.$B$4];2;0)" office:value-type="float" office:value="2" calcext:value-type="float">
            <text:p>2</text:p>
          </table:table-cell>
          <table:table-cell office:value-type="string" calcext:value-type="string">
            <text:p>イジン</text:p>
          </table:table-cell>
          <table:table-cell table:formula="of:=VLOOKUP([.K325];[$種類番号.$A$1:$種類番号.$B$4];2;0)" office:value-type="float" office:value="1" calcext:value-type="float">
            <text:p>1</text:p>
          </table:table-cell>
          <table:table-cell office:value-type="string" calcext:value-type="string">
            <text:p>赤</text:p>
          </table:table-cell>
          <table:table-cell table:formula="of:=VLOOKUP([.M325];[$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5];[$特性番号.$A$1:$特性番号.$B$8];2;0);0)" office:value-type="float" office:value="0" calcext:value-type="float">
            <text:p>0</text:p>
          </table:table-cell>
          <table:table-cell office:value-type="string" calcext:value-type="string">
            <text:p>戦場に置かれたとき、相手の戦場のパワー6000以下のイジン1体を指定して発動できる。そのイジンを破壊して、相手の戦場の起きているイジン1体を破壊する。¶アタック+2000</text:p>
          </table:table-cell>
          <table:table-cell table:style-name="ce8" table:formula="of:=NA()" office:value-type="string" office:string-value="" calcext:value-type="error">
            <text:p>#N/A</text:p>
          </table:table-cell>
          <table:table-cell table:formula="of:=IFERROR(VLOOKUP([.$V325];[$遺業能力番号.$A$1:$遺業能力番号.$B$9];2;0);0)" office:value-type="float" office:value="0" calcext:value-type="float">
            <text:p>0</text:p>
          </table:table-cell>
          <table:table-cell office:value-type="string" calcext:value-type="string">
            <text:p>https://one-draw.jp/ijinden/cardlist/004/card/04_016.png</text:p>
          </table:table-cell>
          <table:table-cell table:formula="of:=CONCATENATE([$JSON.$A$1];[.$C325];[$JSON.$B$1];[.$E325];[$JSON.$C$1];[.$F325];[$JSON.$D$1];IF(ISNA([.$S325]);&quot;null&quot;;&quot;&quot;&quot;&quot;&amp;[.$S325]&amp;&quot;&quot;&quot;&quot;);[$JSON.$E$1];[.$U325];[$JSON.$F$1];IF(ISNA([.$V325]);&quot;null&quot;;&quot;&quot;&quot;&quot;&amp;[.$V325]&amp;&quot;&quot;&quot;&quot;);[$JSON.$G$1];[.$X325];[$JSON.$H$1];[.$H325];[$JSON.$I$1];[.J325];[$JSON.$J$1];[.$L325];[$JSON.$K$1];[.$O325];[$JSON.$L$1];[.$N325];[$JSON.$M$1];[.$R325];[$JSON.$N$1];[.$T325];[$JSON.$O$1];[.$W325];[$JSON.$P$1];[.$A325];[$JSON.$Q$1];[.$B325];[$JSON.$R$1])" office:value-type="string" office:string-value="{&quot;id&quot;:&quot;4-16&quot;,&quot;name&quot;:&quot;源為朝&quot;,&quot;kana&quot;:&quot;みなもとのためとも&quot;,&quot;traitText&quot;:null,&quot;ruleText&quot;:&quot;戦場に置かれたとき、相手の戦場のパワー6000以下のイジン1体を指定して発動できる。そのイジンを破壊して、相手の戦場の起きているイジン1体を破壊する。¶アタック+2000&quot;,&quot;legacyText&quot;:null,&quot;imageUrl&quot;:&quot;https://one-draw.jp/ijinden/cardlist/004/card/04_016.png&quot;,&quot;expansion&quot;:45,&quot;rarity&quot;:2,&quot;type&quot;:1,&quot;level&quot;:6,&quot;color&quot;:1,&quot;term&quot;:0,&quot;trait&quot;:0,&quot;legacy&quot;:0,&quot;orderTable&quot;:325,&quot;orderDeck&quot;:185}," calcext:value-type="string">
            <text:p>{"id":"4-16","name":"源為朝","kana":"みなもとのためとも","traitText":null,"ruleText":"戦場に置かれたとき、相手の戦場のパワー6000以下のイジン1体を指定して発動できる。そのイジンを破壊して、相手の戦場の起きているイジン1体を破壊する。¶アタック+2000","legacyText":null,"imageUrl":"https://one-draw.jp/ijinden/cardlist/004/card/04_016.png","expansion":45,"rarity":2,"type":1,"level":6,"color":1,"term":0,"trait":0,"legacy":0,"orderTable":325,"orderDeck":185},</text:p>
          </table:table-cell>
          <table:table-cell table:number-columns-repeated="16347"/>
        </table:table-row>
        <table:table-row table:style-name="ro2">
          <table:table-cell office:value-type="float" office:value="326" calcext:value-type="float">
            <text:p>326</text:p>
          </table:table-cell>
          <table:table-cell office:value-type="float" office:value="82" calcext:value-type="float">
            <text:p>82</text:p>
          </table:table-cell>
          <table:table-cell office:value-type="string" calcext:value-type="string">
            <text:p>4-17</text:p>
          </table:table-cell>
          <table:table-cell office:value-type="float" office:value="17" calcext:value-type="float">
            <text:p>17</text:p>
          </table:table-cell>
          <table:table-cell office:value-type="string" calcext:value-type="string">
            <text:p>久坂玄瑞</text:p>
          </table:table-cell>
          <table:table-cell office:value-type="string" calcext:value-type="string">
            <text:p>くさかげんすい</text:p>
          </table:table-cell>
          <table:table-cell office:value-type="string" calcext:value-type="string">
            <text:p>第４弾ブースターパック</text:p>
          </table:table-cell>
          <table:table-cell table:formula="of:=VLOOKUP([.G326];[$収録番号.$A$1:$収録番号.$B$9];2;0)" office:value-type="float" office:value="45" calcext:value-type="float">
            <text:p>45</text:p>
          </table:table-cell>
          <table:table-cell office:value-type="string" calcext:value-type="string">
            <text:p>R</text:p>
          </table:table-cell>
          <table:table-cell table:formula="of:=VLOOKUP([.I326];[$レアリティ番号.$A$1:$レアリティ番号.$B$4];2;0)" office:value-type="float" office:value="2" calcext:value-type="float">
            <text:p>2</text:p>
          </table:table-cell>
          <table:table-cell office:value-type="string" calcext:value-type="string">
            <text:p>イジン</text:p>
          </table:table-cell>
          <table:table-cell table:formula="of:=VLOOKUP([.K326];[$種類番号.$A$1:$種類番号.$B$4];2;0)" office:value-type="float" office:value="1" calcext:value-type="float">
            <text:p>1</text:p>
          </table:table-cell>
          <table:table-cell office:value-type="string" calcext:value-type="string">
            <text:p>青</text:p>
          </table:table-cell>
          <table:table-cell table:formula="of:=VLOOKUP([.M326];[$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6];[$能力語番号.$A$1:$能力語番号.$B$10];2;0);0)" office:value-type="float" office:value="0" calcext:value-type="float">
            <text:p>0</text:p>
          </table:table-cell>
          <table:table-cell office:value-type="string" calcext:value-type="string">
            <text:p>思想</text:p>
          </table:table-cell>
          <table:table-cell table:formula="of:=IFERROR(VLOOKUP([.$S326];[$特性番号.$A$1:$特性番号.$B$8];2;0);0)" office:value-type="float" office:value="8" calcext:value-type="float">
            <text:p>8</text:p>
          </table:table-cell>
          <table:table-cell office:value-type="string" calcext:value-type="string">
            <text:p>赤か紫のカードが戦場にある間「即応」を得る。¶緑か黄のカードが戦場にある間「ウォッチャー」を得る。</text:p>
          </table:table-cell>
          <table:table-cell table:style-name="ce8" office:value-type="string" calcext:value-type="string">
            <text:p>喪神</text:p>
          </table:table-cell>
          <table:table-cell table:formula="of:=IFERROR(VLOOKUP([.$V326];[$遺業能力番号.$A$1:$遺業能力番号.$B$9];2;0);0)" office:value-type="float" office:value="9" calcext:value-type="float">
            <text:p>9</text:p>
          </table:table-cell>
          <table:table-cell office:value-type="string" calcext:value-type="string">
            <text:p>https://one-draw.jp/ijinden/cardlist/004/card/04_017.png</text:p>
          </table:table-cell>
          <table:table-cell table:formula="of:=CONCATENATE([$JSON.$A$1];[.$C326];[$JSON.$B$1];[.$E326];[$JSON.$C$1];[.$F326];[$JSON.$D$1];IF(ISNA([.$S326]);&quot;null&quot;;&quot;&quot;&quot;&quot;&amp;[.$S326]&amp;&quot;&quot;&quot;&quot;);[$JSON.$E$1];[.$U326];[$JSON.$F$1];IF(ISNA([.$V326]);&quot;null&quot;;&quot;&quot;&quot;&quot;&amp;[.$V326]&amp;&quot;&quot;&quot;&quot;);[$JSON.$G$1];[.$X326];[$JSON.$H$1];[.$H326];[$JSON.$I$1];[.J326];[$JSON.$J$1];[.$L326];[$JSON.$K$1];[.$O326];[$JSON.$L$1];[.$N326];[$JSON.$M$1];[.$R326];[$JSON.$N$1];[.$T326];[$JSON.$O$1];[.$W326];[$JSON.$P$1];[.$A326];[$JSON.$Q$1];[.$B326];[$JSON.$R$1])" office:value-type="string" office:string-value="{&quot;id&quot;:&quot;4-17&quot;,&quot;name&quot;:&quot;久坂玄瑞&quot;,&quot;kana&quot;:&quot;くさかげんすい&quot;,&quot;traitText&quot;:&quot;思想&quot;,&quot;ruleText&quot;:&quot;赤か紫のカードが戦場にある間「即応」を得る。¶緑か黄のカードが戦場にある間「ウォッチャー」を得る。&quot;,&quot;legacyText&quot;:&quot;喪神&quot;,&quot;imageUrl&quot;:&quot;https://one-draw.jp/ijinden/cardlist/004/card/04_017.png&quot;,&quot;expansion&quot;:45,&quot;rarity&quot;:2,&quot;type&quot;:1,&quot;level&quot;:3,&quot;color&quot;:2,&quot;term&quot;:0,&quot;trait&quot;:8,&quot;legacy&quot;:9,&quot;orderTable&quot;:326,&quot;orderDeck&quot;:82}," calcext:value-type="string">
            <text:p>{"id":"4-17","name":"久坂玄瑞","kana":"くさかげんすい","traitText":"思想","ruleText":"赤か紫のカードが戦場にある間「即応」を得る。¶緑か黄のカードが戦場にある間「ウォッチャー」を得る。","legacyText":"喪神","imageUrl":"https://one-draw.jp/ijinden/cardlist/004/card/04_017.png","expansion":45,"rarity":2,"type":1,"level":3,"color":2,"term":0,"trait":8,"legacy":9,"orderTable":326,"orderDeck":82},</text:p>
          </table:table-cell>
          <table:table-cell table:number-columns-repeated="16347"/>
        </table:table-row>
        <table:table-row table:style-name="ro2">
          <table:table-cell office:value-type="float" office:value="327" calcext:value-type="float">
            <text:p>327</text:p>
          </table:table-cell>
          <table:table-cell office:value-type="float" office:value="162" calcext:value-type="float">
            <text:p>162</text:p>
          </table:table-cell>
          <table:table-cell office:value-type="string" calcext:value-type="string">
            <text:p>4-18</text:p>
          </table:table-cell>
          <table:table-cell office:value-type="float" office:value="18" calcext:value-type="float">
            <text:p>18</text:p>
          </table:table-cell>
          <table:table-cell office:value-type="string" calcext:value-type="string">
            <text:p>ポンパドゥール夫人</text:p>
          </table:table-cell>
          <table:table-cell office:value-type="string" calcext:value-type="string">
            <text:p>ぽんぱどぅーるふじん</text:p>
          </table:table-cell>
          <table:table-cell office:value-type="string" calcext:value-type="string">
            <text:p>第４弾ブースターパック</text:p>
          </table:table-cell>
          <table:table-cell table:formula="of:=VLOOKUP([.G327];[$収録番号.$A$1:$収録番号.$B$9];2;0)" office:value-type="float" office:value="45" calcext:value-type="float">
            <text:p>45</text:p>
          </table:table-cell>
          <table:table-cell office:value-type="string" calcext:value-type="string">
            <text:p>N</text:p>
          </table:table-cell>
          <table:table-cell table:formula="of:=VLOOKUP([.I327];[$レアリティ番号.$A$1:$レアリティ番号.$B$4];2;0)" office:value-type="float" office:value="1" calcext:value-type="float">
            <text:p>1</text:p>
          </table:table-cell>
          <table:table-cell office:value-type="string" calcext:value-type="string">
            <text:p>イジン</text:p>
          </table:table-cell>
          <table:table-cell table:formula="of:=VLOOKUP([.K327];[$種類番号.$A$1:$種類番号.$B$4];2;0)" office:value-type="float" office:value="1" calcext:value-type="float">
            <text:p>1</text:p>
          </table:table-cell>
          <table:table-cell office:value-type="string" calcext:value-type="string">
            <text:p>青</text:p>
          </table:table-cell>
          <table:table-cell table:formula="of:=VLOOKUP([.M327];[$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7];[$特性番号.$A$1:$特性番号.$B$8];2;0);0)" office:value-type="float" office:value="0" calcext:value-type="float">
            <text:p>0</text:p>
          </table:table-cell>
          <table:table-cell office:value-type="string" calcext:value-type="string">
            <text:p>戦場に置かれたとき「思想」カードが自分の戦場か自分の墓地にあるなら、自分の手札のカード1つを指定して発動できる。そのカードを裏向きで戦場に置く。</text:p>
          </table:table-cell>
          <table:table-cell table:style-name="ce8" office:value-type="string" calcext:value-type="string">
            <text:p>木霊</text:p>
          </table:table-cell>
          <table:table-cell table:formula="of:=IFERROR(VLOOKUP([.$V327];[$遺業能力番号.$A$1:$遺業能力番号.$B$9];2;0);0)" office:value-type="float" office:value="8" calcext:value-type="float">
            <text:p>8</text:p>
          </table:table-cell>
          <table:table-cell office:value-type="string" calcext:value-type="string">
            <text:p>https://one-draw.jp/ijinden/cardlist/004/card/04_018.png</text:p>
          </table:table-cell>
          <table:table-cell table:formula="of:=CONCATENATE([$JSON.$A$1];[.$C327];[$JSON.$B$1];[.$E327];[$JSON.$C$1];[.$F327];[$JSON.$D$1];IF(ISNA([.$S327]);&quot;null&quot;;&quot;&quot;&quot;&quot;&amp;[.$S327]&amp;&quot;&quot;&quot;&quot;);[$JSON.$E$1];[.$U327];[$JSON.$F$1];IF(ISNA([.$V327]);&quot;null&quot;;&quot;&quot;&quot;&quot;&amp;[.$V327]&amp;&quot;&quot;&quot;&quot;);[$JSON.$G$1];[.$X327];[$JSON.$H$1];[.$H327];[$JSON.$I$1];[.J327];[$JSON.$J$1];[.$L327];[$JSON.$K$1];[.$O327];[$JSON.$L$1];[.$N327];[$JSON.$M$1];[.$R327];[$JSON.$N$1];[.$T327];[$JSON.$O$1];[.$W327];[$JSON.$P$1];[.$A327];[$JSON.$Q$1];[.$B327];[$JSON.$R$1])" office:value-type="string" office:string-value="{&quot;id&quot;:&quot;4-18&quot;,&quot;name&quot;:&quot;ポンパドゥール夫人&quot;,&quot;kana&quot;:&quot;ぽんぱどぅーるふじん&quot;,&quot;traitText&quot;:null,&quot;ruleText&quot;:&quot;戦場に置かれたとき「思想」カードが自分の戦場か自分の墓地にあるなら、自分の手札のカード1つを指定して発動できる。そのカードを裏向きで戦場に置く。&quot;,&quot;legacyText&quot;:&quot;木霊&quot;,&quot;imageUrl&quot;:&quot;https://one-draw.jp/ijinden/cardlist/004/card/04_018.png&quot;,&quot;expansion&quot;:45,&quot;rarity&quot;:1,&quot;type&quot;:1,&quot;level&quot;:5,&quot;color&quot;:2,&quot;term&quot;:0,&quot;trait&quot;:0,&quot;legacy&quot;:8,&quot;orderTable&quot;:327,&quot;orderDeck&quot;:162}," calcext:value-type="string">
            <text:p>{"id":"4-18","name":"ポンパドゥール夫人","kana":"ぽんぱどぅーるふじん","traitText":null,"ruleText":"戦場に置かれたとき「思想」カードが自分の戦場か自分の墓地にあるなら、自分の手札のカード1つを指定して発動できる。そのカードを裏向きで戦場に置く。","legacyText":"木霊","imageUrl":"https://one-draw.jp/ijinden/cardlist/004/card/04_018.png","expansion":45,"rarity":1,"type":1,"level":5,"color":2,"term":0,"trait":0,"legacy":8,"orderTable":327,"orderDeck":162},</text:p>
          </table:table-cell>
          <table:table-cell table:number-columns-repeated="16347"/>
        </table:table-row>
        <table:table-row table:style-name="ro2">
          <table:table-cell office:value-type="float" office:value="328" calcext:value-type="float">
            <text:p>328</text:p>
          </table:table-cell>
          <table:table-cell office:value-type="float" office:value="42" calcext:value-type="float">
            <text:p>42</text:p>
          </table:table-cell>
          <table:table-cell office:value-type="string" calcext:value-type="string">
            <text:p>4-19</text:p>
          </table:table-cell>
          <table:table-cell office:value-type="float" office:value="19" calcext:value-type="float">
            <text:p>19</text:p>
          </table:table-cell>
          <table:table-cell office:value-type="string" calcext:value-type="string">
            <text:p>エドモンド・カートライト</text:p>
          </table:table-cell>
          <table:table-cell office:value-type="string" calcext:value-type="string">
            <text:p>えどもんどかーとらいと</text:p>
          </table:table-cell>
          <table:table-cell office:value-type="string" calcext:value-type="string">
            <text:p>第４弾ブースターパック</text:p>
          </table:table-cell>
          <table:table-cell table:formula="of:=VLOOKUP([.G328];[$収録番号.$A$1:$収録番号.$B$9];2;0)" office:value-type="float" office:value="45" calcext:value-type="float">
            <text:p>45</text:p>
          </table:table-cell>
          <table:table-cell office:value-type="string" calcext:value-type="string">
            <text:p>N</text:p>
          </table:table-cell>
          <table:table-cell table:formula="of:=VLOOKUP([.I328];[$レアリティ番号.$A$1:$レアリティ番号.$B$4];2;0)" office:value-type="float" office:value="1" calcext:value-type="float">
            <text:p>1</text:p>
          </table:table-cell>
          <table:table-cell office:value-type="string" calcext:value-type="string">
            <text:p>イジン</text:p>
          </table:table-cell>
          <table:table-cell table:formula="of:=VLOOKUP([.K328];[$種類番号.$A$1:$種類番号.$B$4];2;0)" office:value-type="float" office:value="1" calcext:value-type="float">
            <text:p>1</text:p>
          </table:table-cell>
          <table:table-cell office:value-type="string" calcext:value-type="string">
            <text:p>青</text:p>
          </table:table-cell>
          <table:table-cell table:formula="of:=VLOOKUP([.M328];[$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8];[$特性番号.$A$1:$特性番号.$B$8];2;0);0)" office:value-type="float" office:value="0" calcext:value-type="float">
            <text:p>0</text:p>
          </table:table-cell>
          <table:table-cell office:value-type="string" calcext:value-type="string">
            <text:p>イジンが戦場に置かれたとき、装備されているカード1つを指定して発動できる。そのカードを手札に戻して、1ドローする。¶ブロック+2000</text:p>
          </table:table-cell>
          <table:table-cell table:style-name="ce8" office:value-type="string" calcext:value-type="string">
            <text:p>1ドローする</text:p>
          </table:table-cell>
          <table:table-cell table:formula="of:=IFERROR(VLOOKUP([.$V328];[$遺業能力番号.$A$1:$遺業能力番号.$B$9];2;0);0)" office:value-type="float" office:value="4" calcext:value-type="float">
            <text:p>4</text:p>
          </table:table-cell>
          <table:table-cell office:value-type="string" calcext:value-type="string">
            <text:p>https://one-draw.jp/ijinden/cardlist/004/card/04_019.png</text:p>
          </table:table-cell>
          <table:table-cell table:formula="of:=CONCATENATE([$JSON.$A$1];[.$C328];[$JSON.$B$1];[.$E328];[$JSON.$C$1];[.$F328];[$JSON.$D$1];IF(ISNA([.$S328]);&quot;null&quot;;&quot;&quot;&quot;&quot;&amp;[.$S328]&amp;&quot;&quot;&quot;&quot;);[$JSON.$E$1];[.$U328];[$JSON.$F$1];IF(ISNA([.$V328]);&quot;null&quot;;&quot;&quot;&quot;&quot;&amp;[.$V328]&amp;&quot;&quot;&quot;&quot;);[$JSON.$G$1];[.$X328];[$JSON.$H$1];[.$H328];[$JSON.$I$1];[.J328];[$JSON.$J$1];[.$L328];[$JSON.$K$1];[.$O328];[$JSON.$L$1];[.$N328];[$JSON.$M$1];[.$R328];[$JSON.$N$1];[.$T328];[$JSON.$O$1];[.$W328];[$JSON.$P$1];[.$A328];[$JSON.$Q$1];[.$B328];[$JSON.$R$1])" office:value-type="string" office:string-value="{&quot;id&quot;:&quot;4-19&quot;,&quot;name&quot;:&quot;エドモンド・カートライト&quot;,&quot;kana&quot;:&quot;えどもんどかーとらいと&quot;,&quot;traitText&quot;:null,&quot;ruleText&quot;:&quot;イジンが戦場に置かれたとき、装備されているカード1つを指定して発動できる。そのカードを手札に戻して、1ドローする。¶ブロック+2000&quot;,&quot;legacyText&quot;:&quot;1ドローする&quot;,&quot;imageUrl&quot;:&quot;https://one-draw.jp/ijinden/cardlist/004/card/04_019.png&quot;,&quot;expansion&quot;:45,&quot;rarity&quot;:1,&quot;type&quot;:1,&quot;level&quot;:2,&quot;color&quot;:2,&quot;term&quot;:0,&quot;trait&quot;:0,&quot;legacy&quot;:4,&quot;orderTable&quot;:328,&quot;orderDeck&quot;:42}," calcext:value-type="string">
            <text:p>{"id":"4-19","name":"エドモンド・カートライト","kana":"えどもんどかーとらいと","traitText":null,"ruleText":"イジンが戦場に置かれたとき、装備されているカード1つを指定して発動できる。そのカードを手札に戻して、1ドローする。¶ブロック+2000","legacyText":"1ドローする","imageUrl":"https://one-draw.jp/ijinden/cardlist/004/card/04_019.png","expansion":45,"rarity":1,"type":1,"level":2,"color":2,"term":0,"trait":0,"legacy":4,"orderTable":328,"orderDeck":42},</text:p>
          </table:table-cell>
          <table:table-cell table:number-columns-repeated="16347"/>
        </table:table-row>
        <table:table-row table:style-name="ro2">
          <table:table-cell office:value-type="float" office:value="329" calcext:value-type="float">
            <text:p>329</text:p>
          </table:table-cell>
          <table:table-cell office:value-type="float" office:value="43" calcext:value-type="float">
            <text:p>43</text:p>
          </table:table-cell>
          <table:table-cell office:value-type="string" calcext:value-type="string">
            <text:p>4-20</text:p>
          </table:table-cell>
          <table:table-cell office:value-type="float" office:value="20" calcext:value-type="float">
            <text:p>20</text:p>
          </table:table-cell>
          <table:table-cell office:value-type="string" calcext:value-type="string">
            <text:p>クロード・アシル・ドビュッシー</text:p>
          </table:table-cell>
          <table:table-cell office:value-type="string" calcext:value-type="string">
            <text:p>くろーどあしるどびゅっしー</text:p>
          </table:table-cell>
          <table:table-cell office:value-type="string" calcext:value-type="string">
            <text:p>第４弾ブースターパック</text:p>
          </table:table-cell>
          <table:table-cell table:formula="of:=VLOOKUP([.G329];[$収録番号.$A$1:$収録番号.$B$9];2;0)" office:value-type="float" office:value="45" calcext:value-type="float">
            <text:p>45</text:p>
          </table:table-cell>
          <table:table-cell office:value-type="string" calcext:value-type="string">
            <text:p>N</text:p>
          </table:table-cell>
          <table:table-cell table:formula="of:=VLOOKUP([.I329];[$レアリティ番号.$A$1:$レアリティ番号.$B$4];2;0)" office:value-type="float" office:value="1" calcext:value-type="float">
            <text:p>1</text:p>
          </table:table-cell>
          <table:table-cell office:value-type="string" calcext:value-type="string">
            <text:p>イジン</text:p>
          </table:table-cell>
          <table:table-cell table:formula="of:=VLOOKUP([.K329];[$種類番号.$A$1:$種類番号.$B$4];2;0)" office:value-type="float" office:value="1" calcext:value-type="float">
            <text:p>1</text:p>
          </table:table-cell>
          <table:table-cell office:value-type="string" calcext:value-type="string">
            <text:p>青</text:p>
          </table:table-cell>
          <table:table-cell table:formula="of:=VLOOKUP([.M329];[$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9];[$能力語番号.$A$1:$能力語番号.$B$10];2;0);0)" office:value-type="float" office:value="0" calcext:value-type="float">
            <text:p>0</text:p>
          </table:table-cell>
          <table:table-cell office:value-type="string" calcext:value-type="string">
            <text:p>音楽</text:p>
          </table:table-cell>
          <table:table-cell table:formula="of:=IFERROR(VLOOKUP([.$S329];[$特性番号.$A$1:$特性番号.$B$8];2;0);0)" office:value-type="float" office:value="4" calcext:value-type="float">
            <text:p>4</text:p>
          </table:table-cell>
          <table:table-cell office:value-type="string" calcext:value-type="string">
            <text:p>戦場に置かれたとき、自分の戦場のイジン1体かガーディアン1体を寝かせる。¶これが戦場にいる間、戦場のレベル3以下の赤のイジンは能力すべてを失う。この能力は能力によって失われない。</text:p>
          </table:table-cell>
          <table:table-cell table:style-name="ce8" office:value-type="string" calcext:value-type="string">
            <text:p>1ドローする</text:p>
          </table:table-cell>
          <table:table-cell table:formula="of:=IFERROR(VLOOKUP([.$V329];[$遺業能力番号.$A$1:$遺業能力番号.$B$9];2;0);0)" office:value-type="float" office:value="4" calcext:value-type="float">
            <text:p>4</text:p>
          </table:table-cell>
          <table:table-cell office:value-type="string" calcext:value-type="string">
            <text:p>https://one-draw.jp/ijinden/cardlist/004/card/04_020.png</text:p>
          </table:table-cell>
          <table:table-cell table:formula="of:=CONCATENATE([$JSON.$A$1];[.$C329];[$JSON.$B$1];[.$E329];[$JSON.$C$1];[.$F329];[$JSON.$D$1];IF(ISNA([.$S329]);&quot;null&quot;;&quot;&quot;&quot;&quot;&amp;[.$S329]&amp;&quot;&quot;&quot;&quot;);[$JSON.$E$1];[.$U329];[$JSON.$F$1];IF(ISNA([.$V329]);&quot;null&quot;;&quot;&quot;&quot;&quot;&amp;[.$V329]&amp;&quot;&quot;&quot;&quot;);[$JSON.$G$1];[.$X329];[$JSON.$H$1];[.$H329];[$JSON.$I$1];[.J329];[$JSON.$J$1];[.$L329];[$JSON.$K$1];[.$O329];[$JSON.$L$1];[.$N329];[$JSON.$M$1];[.$R329];[$JSON.$N$1];[.$T329];[$JSON.$O$1];[.$W329];[$JSON.$P$1];[.$A329];[$JSON.$Q$1];[.$B329];[$JSON.$R$1])" office:value-type="string" office:string-value="{&quot;id&quot;:&quot;4-20&quot;,&quot;name&quot;:&quot;クロード・アシル・ドビュッシー&quot;,&quot;kana&quot;:&quot;くろーどあしるどびゅっしー&quot;,&quot;traitText&quot;:&quot;音楽&quot;,&quot;ruleText&quot;:&quot;戦場に置かれたとき、自分の戦場のイジン1体かガーディアン1体を寝かせる。¶これが戦場にいる間、戦場のレベル3以下の赤のイジンは能力すべてを失う。この能力は能力によって失われない。&quot;,&quot;legacyText&quot;:&quot;1ドローする&quot;,&quot;imageUrl&quot;:&quot;https://one-draw.jp/ijinden/cardlist/004/card/04_020.png&quot;,&quot;expansion&quot;:45,&quot;rarity&quot;:1,&quot;type&quot;:1,&quot;level&quot;:2,&quot;color&quot;:2,&quot;term&quot;:0,&quot;trait&quot;:4,&quot;legacy&quot;:4,&quot;orderTable&quot;:329,&quot;orderDeck&quot;:43}," calcext:value-type="string">
            <text:p>{"id":"4-20","name":"クロード・アシル・ドビュッシー","kana":"くろーどあしるどびゅっしー","traitText":"音楽","ruleText":"戦場に置かれたとき、自分の戦場のイジン1体かガーディアン1体を寝かせる。¶これが戦場にいる間、戦場のレベル3以下の赤のイジンは能力すべてを失う。この能力は能力によって失われない。","legacyText":"1ドローする","imageUrl":"https://one-draw.jp/ijinden/cardlist/004/card/04_020.png","expansion":45,"rarity":1,"type":1,"level":2,"color":2,"term":0,"trait":4,"legacy":4,"orderTable":329,"orderDeck":43},</text:p>
          </table:table-cell>
          <table:table-cell table:number-columns-repeated="16347"/>
        </table:table-row>
        <table:table-row table:style-name="ro2">
          <table:table-cell office:value-type="float" office:value="330" calcext:value-type="float">
            <text:p>330</text:p>
          </table:table-cell>
          <table:table-cell office:value-type="float" office:value="11" calcext:value-type="float">
            <text:p>11</text:p>
          </table:table-cell>
          <table:table-cell office:value-type="string" calcext:value-type="string">
            <text:p>4-21</text:p>
          </table:table-cell>
          <table:table-cell office:value-type="float" office:value="21" calcext:value-type="float">
            <text:p>21</text:p>
          </table:table-cell>
          <table:table-cell office:value-type="string" calcext:value-type="string">
            <text:p>フレデリック・フランソワ・ショパン</text:p>
          </table:table-cell>
          <table:table-cell office:value-type="string" calcext:value-type="string">
            <text:p>ふれでりっくふらんそわしょぱん</text:p>
          </table:table-cell>
          <table:table-cell office:value-type="string" calcext:value-type="string">
            <text:p>第４弾ブースターパック</text:p>
          </table:table-cell>
          <table:table-cell table:formula="of:=VLOOKUP([.G330];[$収録番号.$A$1:$収録番号.$B$9];2;0)" office:value-type="float" office:value="45" calcext:value-type="float">
            <text:p>45</text:p>
          </table:table-cell>
          <table:table-cell office:value-type="string" calcext:value-type="string">
            <text:p>N</text:p>
          </table:table-cell>
          <table:table-cell table:formula="of:=VLOOKUP([.I330];[$レアリティ番号.$A$1:$レアリティ番号.$B$4];2;0)" office:value-type="float" office:value="1" calcext:value-type="float">
            <text:p>1</text:p>
          </table:table-cell>
          <table:table-cell office:value-type="string" calcext:value-type="string">
            <text:p>イジン</text:p>
          </table:table-cell>
          <table:table-cell table:formula="of:=VLOOKUP([.K330];[$種類番号.$A$1:$種類番号.$B$4];2;0)" office:value-type="float" office:value="1" calcext:value-type="float">
            <text:p>1</text:p>
          </table:table-cell>
          <table:table-cell office:value-type="string" calcext:value-type="string">
            <text:p>青</text:p>
          </table:table-cell>
          <table:table-cell table:formula="of:=VLOOKUP([.M330];[$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0];[$能力語番号.$A$1:$能力語番号.$B$10];2;0);0)" office:value-type="float" office:value="0" calcext:value-type="float">
            <text:p>0</text:p>
          </table:table-cell>
          <table:table-cell office:value-type="string" calcext:value-type="string">
            <text:p>音楽</text:p>
          </table:table-cell>
          <table:table-cell table:formula="of:=IFERROR(VLOOKUP([.$S330];[$特性番号.$A$1:$特性番号.$B$8];2;0);0)" office:value-type="float" office:value="4" calcext:value-type="float">
            <text:p>4</text:p>
          </table:table-cell>
          <table:table-cell office:value-type="string" calcext:value-type="string">
            <text:p>戦場に置かれたとき、自分の戦場のイジン1体かガーディアン1体を寝かせる。¶ブロック+2000</text:p>
          </table:table-cell>
          <table:table-cell table:style-name="ce8" office:value-type="string" calcext:value-type="string">
            <text:p>1ドローする</text:p>
          </table:table-cell>
          <table:table-cell table:formula="of:=IFERROR(VLOOKUP([.$V330];[$遺業能力番号.$A$1:$遺業能力番号.$B$9];2;0);0)" office:value-type="float" office:value="4" calcext:value-type="float">
            <text:p>4</text:p>
          </table:table-cell>
          <table:table-cell office:value-type="string" calcext:value-type="string">
            <text:p>https://one-draw.jp/ijinden/cardlist/004/card/04_021.png</text:p>
          </table:table-cell>
          <table:table-cell table:formula="of:=CONCATENATE([$JSON.$A$1];[.$C330];[$JSON.$B$1];[.$E330];[$JSON.$C$1];[.$F330];[$JSON.$D$1];IF(ISNA([.$S330]);&quot;null&quot;;&quot;&quot;&quot;&quot;&amp;[.$S330]&amp;&quot;&quot;&quot;&quot;);[$JSON.$E$1];[.$U330];[$JSON.$F$1];IF(ISNA([.$V330]);&quot;null&quot;;&quot;&quot;&quot;&quot;&amp;[.$V330]&amp;&quot;&quot;&quot;&quot;);[$JSON.$G$1];[.$X330];[$JSON.$H$1];[.$H330];[$JSON.$I$1];[.J330];[$JSON.$J$1];[.$L330];[$JSON.$K$1];[.$O330];[$JSON.$L$1];[.$N330];[$JSON.$M$1];[.$R330];[$JSON.$N$1];[.$T330];[$JSON.$O$1];[.$W330];[$JSON.$P$1];[.$A330];[$JSON.$Q$1];[.$B330];[$JSON.$R$1])" office:value-type="string" office:string-value="{&quot;id&quot;:&quot;4-21&quot;,&quot;name&quot;:&quot;フレデリック・フランソワ・ショパン&quot;,&quot;kana&quot;:&quot;ふれでりっくふらんそわしょぱん&quot;,&quot;traitText&quot;:&quot;音楽&quot;,&quot;ruleText&quot;:&quot;戦場に置かれたとき、自分の戦場のイジン1体かガーディアン1体を寝かせる。¶ブロック+2000&quot;,&quot;legacyText&quot;:&quot;1ドローする&quot;,&quot;imageUrl&quot;:&quot;https://one-draw.jp/ijinden/cardlist/004/card/04_021.png&quot;,&quot;expansion&quot;:45,&quot;rarity&quot;:1,&quot;type&quot;:1,&quot;level&quot;:1,&quot;color&quot;:2,&quot;term&quot;:0,&quot;trait&quot;:4,&quot;legacy&quot;:4,&quot;orderTable&quot;:330,&quot;orderDeck&quot;:11}," calcext:value-type="string">
            <text:p>{"id":"4-21","name":"フレデリック・フランソワ・ショパン","kana":"ふれでりっくふらんそわしょぱん","traitText":"音楽","ruleText":"戦場に置かれたとき、自分の戦場のイジン1体かガーディアン1体を寝かせる。¶ブロック+2000","legacyText":"1ドローする","imageUrl":"https://one-draw.jp/ijinden/cardlist/004/card/04_021.png","expansion":45,"rarity":1,"type":1,"level":1,"color":2,"term":0,"trait":4,"legacy":4,"orderTable":330,"orderDeck":11},</text:p>
          </table:table-cell>
          <table:table-cell table:number-columns-repeated="16347"/>
        </table:table-row>
        <table:table-row table:style-name="ro2">
          <table:table-cell office:value-type="float" office:value="331" calcext:value-type="float">
            <text:p>331</text:p>
          </table:table-cell>
          <table:table-cell office:value-type="float" office:value="83" calcext:value-type="float">
            <text:p>83</text:p>
          </table:table-cell>
          <table:table-cell office:value-type="string" calcext:value-type="string">
            <text:p>4-22</text:p>
          </table:table-cell>
          <table:table-cell office:value-type="float" office:value="22" calcext:value-type="float">
            <text:p>22</text:p>
          </table:table-cell>
          <table:table-cell office:value-type="string" calcext:value-type="string">
            <text:p>ピョートル・イリイチ・チャイコフスキー</text:p>
          </table:table-cell>
          <table:table-cell office:value-type="string" calcext:value-type="string">
            <text:p>ぴょーとるいりいちちゃいこふすきー</text:p>
          </table:table-cell>
          <table:table-cell office:value-type="string" calcext:value-type="string">
            <text:p>第４弾ブースターパック</text:p>
          </table:table-cell>
          <table:table-cell table:formula="of:=VLOOKUP([.G331];[$収録番号.$A$1:$収録番号.$B$9];2;0)" office:value-type="float" office:value="45" calcext:value-type="float">
            <text:p>45</text:p>
          </table:table-cell>
          <table:table-cell office:value-type="string" calcext:value-type="string">
            <text:p>R</text:p>
          </table:table-cell>
          <table:table-cell table:formula="of:=VLOOKUP([.I331];[$レアリティ番号.$A$1:$レアリティ番号.$B$4];2;0)" office:value-type="float" office:value="2" calcext:value-type="float">
            <text:p>2</text:p>
          </table:table-cell>
          <table:table-cell office:value-type="string" calcext:value-type="string">
            <text:p>イジン</text:p>
          </table:table-cell>
          <table:table-cell table:formula="of:=VLOOKUP([.K331];[$種類番号.$A$1:$種類番号.$B$4];2;0)" office:value-type="float" office:value="1" calcext:value-type="float">
            <text:p>1</text:p>
          </table:table-cell>
          <table:table-cell office:value-type="string" calcext:value-type="string">
            <text:p>青</text:p>
          </table:table-cell>
          <table:table-cell table:formula="of:=VLOOKUP([.M331];[$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1];[$能力語番号.$A$1:$能力語番号.$B$10];2;0);0)" office:value-type="float" office:value="0" calcext:value-type="float">
            <text:p>0</text:p>
          </table:table-cell>
          <table:table-cell office:value-type="string" calcext:value-type="string">
            <text:p>音楽</text:p>
          </table:table-cell>
          <table:table-cell table:formula="of:=IFERROR(VLOOKUP([.$S331];[$特性番号.$A$1:$特性番号.$B$8];2;0);0)" office:value-type="float" office:value="4" calcext:value-type="float">
            <text:p>4</text:p>
          </table:table-cell>
          <table:table-cell office:value-type="string" calcext:value-type="string">
            <text:p>戦場に置かれたとき、自分の戦場のイジン1体かガーディアン1体を寝かせて、1ドローする。</text:p>
          </table:table-cell>
          <table:table-cell table:style-name="ce8" office:value-type="string" calcext:value-type="string">
            <text:p>1ドローする</text:p>
          </table:table-cell>
          <table:table-cell table:formula="of:=IFERROR(VLOOKUP([.$V331];[$遺業能力番号.$A$1:$遺業能力番号.$B$9];2;0);0)" office:value-type="float" office:value="4" calcext:value-type="float">
            <text:p>4</text:p>
          </table:table-cell>
          <table:table-cell office:value-type="string" calcext:value-type="string">
            <text:p>https://one-draw.jp/ijinden/cardlist/004/card/04_022.png</text:p>
          </table:table-cell>
          <table:table-cell table:formula="of:=CONCATENATE([$JSON.$A$1];[.$C331];[$JSON.$B$1];[.$E331];[$JSON.$C$1];[.$F331];[$JSON.$D$1];IF(ISNA([.$S331]);&quot;null&quot;;&quot;&quot;&quot;&quot;&amp;[.$S331]&amp;&quot;&quot;&quot;&quot;);[$JSON.$E$1];[.$U331];[$JSON.$F$1];IF(ISNA([.$V331]);&quot;null&quot;;&quot;&quot;&quot;&quot;&amp;[.$V331]&amp;&quot;&quot;&quot;&quot;);[$JSON.$G$1];[.$X331];[$JSON.$H$1];[.$H331];[$JSON.$I$1];[.J331];[$JSON.$J$1];[.$L331];[$JSON.$K$1];[.$O331];[$JSON.$L$1];[.$N331];[$JSON.$M$1];[.$R331];[$JSON.$N$1];[.$T331];[$JSON.$O$1];[.$W331];[$JSON.$P$1];[.$A331];[$JSON.$Q$1];[.$B331];[$JSON.$R$1])" office:value-type="string" office:string-value="{&quot;id&quot;:&quot;4-22&quot;,&quot;name&quot;:&quot;ピョートル・イリイチ・チャイコフスキー&quot;,&quot;kana&quot;:&quot;ぴょーとるいりいちちゃいこふすきー&quot;,&quot;traitText&quot;:&quot;音楽&quot;,&quot;ruleText&quot;:&quot;戦場に置かれたとき、自分の戦場のイジン1体かガーディアン1体を寝かせて、1ドローする。&quot;,&quot;legacyText&quot;:&quot;1ドローする&quot;,&quot;imageUrl&quot;:&quot;https://one-draw.jp/ijinden/cardlist/004/card/04_022.png&quot;,&quot;expansion&quot;:45,&quot;rarity&quot;:2,&quot;type&quot;:1,&quot;level&quot;:3,&quot;color&quot;:2,&quot;term&quot;:0,&quot;trait&quot;:4,&quot;legacy&quot;:4,&quot;orderTable&quot;:331,&quot;orderDeck&quot;:83}," calcext:value-type="string">
            <text:p>{"id":"4-22","name":"ピョートル・イリイチ・チャイコフスキー","kana":"ぴょーとるいりいちちゃいこふすきー","traitText":"音楽","ruleText":"戦場に置かれたとき、自分の戦場のイジン1体かガーディアン1体を寝かせて、1ドローする。","legacyText":"1ドローする","imageUrl":"https://one-draw.jp/ijinden/cardlist/004/card/04_022.png","expansion":45,"rarity":2,"type":1,"level":3,"color":2,"term":0,"trait":4,"legacy":4,"orderTable":331,"orderDeck":83},</text:p>
          </table:table-cell>
          <table:table-cell table:number-columns-repeated="16347"/>
        </table:table-row>
        <table:table-row table:style-name="ro2">
          <table:table-cell office:value-type="float" office:value="332" calcext:value-type="float">
            <text:p>332</text:p>
          </table:table-cell>
          <table:table-cell office:value-type="float" office:value="212" calcext:value-type="float">
            <text:p>212</text:p>
          </table:table-cell>
          <table:table-cell office:value-type="string" calcext:value-type="string">
            <text:p>4-23</text:p>
          </table:table-cell>
          <table:table-cell office:value-type="float" office:value="23" calcext:value-type="float">
            <text:p>23</text:p>
          </table:table-cell>
          <table:table-cell office:value-type="string" calcext:value-type="string">
            <text:p>岩倉具視</text:p>
          </table:table-cell>
          <table:table-cell office:value-type="string" calcext:value-type="string">
            <text:p>いわくらともみ</text:p>
          </table:table-cell>
          <table:table-cell office:value-type="string" calcext:value-type="string">
            <text:p>第４弾ブースターパック</text:p>
          </table:table-cell>
          <table:table-cell table:formula="of:=VLOOKUP([.G332];[$収録番号.$A$1:$収録番号.$B$9];2;0)" office:value-type="float" office:value="45" calcext:value-type="float">
            <text:p>45</text:p>
          </table:table-cell>
          <table:table-cell office:value-type="string" calcext:value-type="string">
            <text:p>R</text:p>
          </table:table-cell>
          <table:table-cell table:formula="of:=VLOOKUP([.I332];[$レアリティ番号.$A$1:$レアリティ番号.$B$4];2;0)" office:value-type="float" office:value="2" calcext:value-type="float">
            <text:p>2</text:p>
          </table:table-cell>
          <table:table-cell office:value-type="string" calcext:value-type="string">
            <text:p>イジン</text:p>
          </table:table-cell>
          <table:table-cell table:formula="of:=VLOOKUP([.K332];[$種類番号.$A$1:$種類番号.$B$4];2;0)" office:value-type="float" office:value="1" calcext:value-type="float">
            <text:p>1</text:p>
          </table:table-cell>
          <table:table-cell office:value-type="string" calcext:value-type="string">
            <text:p>緑</text:p>
          </table:table-cell>
          <table:table-cell table:formula="of:=VLOOKUP([.M332];[$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office:value-type="string" calcext:value-type="string">
            <text:p>航海</text:p>
          </table:table-cell>
          <table:table-cell table:formula="of:=IFERROR(VLOOKUP([.$Q332];[$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332];[$特性番号.$A$1:$特性番号.$B$8];2;0);0)" office:value-type="float" office:value="0" calcext:value-type="float">
            <text:p>0</text:p>
          </table:table-cell>
          <table:table-cell office:value-type="string" calcext:value-type="string">
            <text:p>トリプルプレッシャー¶航海 - アタッカーになったとき、相手の戦場の色1つにつき、1ドローして、自分の戦場のイジンすべてを起こす。</text:p>
          </table:table-cell>
          <table:table-cell table:style-name="ce8" table:formula="of:=NA()" office:value-type="string" office:string-value="" calcext:value-type="error">
            <text:p>#N/A</text:p>
          </table:table-cell>
          <table:table-cell table:formula="of:=IFERROR(VLOOKUP([.$V332];[$遺業能力番号.$A$1:$遺業能力番号.$B$9];2;0);0)" office:value-type="float" office:value="0" calcext:value-type="float">
            <text:p>0</text:p>
          </table:table-cell>
          <table:table-cell office:value-type="string" calcext:value-type="string">
            <text:p>https://one-draw.jp/ijinden/cardlist/004/card/04_023.png</text:p>
          </table:table-cell>
          <table:table-cell table:formula="of:=CONCATENATE([$JSON.$A$1];[.$C332];[$JSON.$B$1];[.$E332];[$JSON.$C$1];[.$F332];[$JSON.$D$1];IF(ISNA([.$S332]);&quot;null&quot;;&quot;&quot;&quot;&quot;&amp;[.$S332]&amp;&quot;&quot;&quot;&quot;);[$JSON.$E$1];[.$U332];[$JSON.$F$1];IF(ISNA([.$V332]);&quot;null&quot;;&quot;&quot;&quot;&quot;&amp;[.$V332]&amp;&quot;&quot;&quot;&quot;);[$JSON.$G$1];[.$X332];[$JSON.$H$1];[.$H332];[$JSON.$I$1];[.J332];[$JSON.$J$1];[.$L332];[$JSON.$K$1];[.$O332];[$JSON.$L$1];[.$N332];[$JSON.$M$1];[.$R332];[$JSON.$N$1];[.$T332];[$JSON.$O$1];[.$W332];[$JSON.$P$1];[.$A332];[$JSON.$Q$1];[.$B332];[$JSON.$R$1])" office:value-type="string" office:string-value="{&quot;id&quot;:&quot;4-23&quot;,&quot;name&quot;:&quot;岩倉具視&quot;,&quot;kana&quot;:&quot;いわくらともみ&quot;,&quot;traitText&quot;:null,&quot;ruleText&quot;:&quot;トリプルプレッシャー¶航海 - アタッカーになったとき、相手の戦場の色1つにつき、1ドローして、自分の戦場のイジンすべてを起こす。&quot;,&quot;legacyText&quot;:null,&quot;imageUrl&quot;:&quot;https://one-draw.jp/ijinden/cardlist/004/card/04_023.png&quot;,&quot;expansion&quot;:45,&quot;rarity&quot;:2,&quot;type&quot;:1,&quot;level&quot;:7,&quot;color&quot;:4,&quot;term&quot;:1,&quot;trait&quot;:0,&quot;legacy&quot;:0,&quot;orderTable&quot;:332,&quot;orderDeck&quot;:212}," calcext:value-type="string">
            <text:p>{"id":"4-23","name":"岩倉具視","kana":"いわくらともみ","traitText":null,"ruleText":"トリプルプレッシャー¶航海 - アタッカーになったとき、相手の戦場の色1つにつき、1ドローして、自分の戦場のイジンすべてを起こす。","legacyText":null,"imageUrl":"https://one-draw.jp/ijinden/cardlist/004/card/04_023.png","expansion":45,"rarity":2,"type":1,"level":7,"color":4,"term":1,"trait":0,"legacy":0,"orderTable":332,"orderDeck":212},</text:p>
          </table:table-cell>
          <table:table-cell table:number-columns-repeated="16347"/>
        </table:table-row>
        <table:table-row table:style-name="ro2">
          <table:table-cell office:value-type="float" office:value="333" calcext:value-type="float">
            <text:p>333</text:p>
          </table:table-cell>
          <table:table-cell office:value-type="float" office:value="92" calcext:value-type="float">
            <text:p>92</text:p>
          </table:table-cell>
          <table:table-cell office:value-type="string" calcext:value-type="string">
            <text:p>4-24</text:p>
          </table:table-cell>
          <table:table-cell office:value-type="float" office:value="24" calcext:value-type="float">
            <text:p>24</text:p>
          </table:table-cell>
          <table:table-cell office:value-type="string" calcext:value-type="string">
            <text:p>クララ・ヨゼフィーネ・シューマン</text:p>
          </table:table-cell>
          <table:table-cell office:value-type="string" calcext:value-type="string">
            <text:p>くららよぜふぃーねしゅーまん</text:p>
          </table:table-cell>
          <table:table-cell office:value-type="string" calcext:value-type="string">
            <text:p>第４弾ブースターパック</text:p>
          </table:table-cell>
          <table:table-cell table:formula="of:=VLOOKUP([.G333];[$収録番号.$A$1:$収録番号.$B$9];2;0)" office:value-type="float" office:value="45" calcext:value-type="float">
            <text:p>45</text:p>
          </table:table-cell>
          <table:table-cell office:value-type="string" calcext:value-type="string">
            <text:p>N</text:p>
          </table:table-cell>
          <table:table-cell table:formula="of:=VLOOKUP([.I333];[$レアリティ番号.$A$1:$レアリティ番号.$B$4];2;0)" office:value-type="float" office:value="1" calcext:value-type="float">
            <text:p>1</text:p>
          </table:table-cell>
          <table:table-cell office:value-type="string" calcext:value-type="string">
            <text:p>イジン</text:p>
          </table:table-cell>
          <table:table-cell table:formula="of:=VLOOKUP([.K333];[$種類番号.$A$1:$種類番号.$B$4];2;0)" office:value-type="float" office:value="1" calcext:value-type="float">
            <text:p>1</text:p>
          </table:table-cell>
          <table:table-cell office:value-type="string" calcext:value-type="string">
            <text:p>緑</text:p>
          </table:table-cell>
          <table:table-cell table:formula="of:=VLOOKUP([.M333];[$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3];[$能力語番号.$A$1:$能力語番号.$B$10];2;0);0)" office:value-type="float" office:value="0" calcext:value-type="float">
            <text:p>0</text:p>
          </table:table-cell>
          <table:table-cell office:value-type="string" calcext:value-type="string">
            <text:p>音楽</text:p>
          </table:table-cell>
          <table:table-cell table:formula="of:=IFERROR(VLOOKUP([.$S333];[$特性番号.$A$1:$特性番号.$B$8];2;0);0)" office:value-type="float" office:value="4" calcext:value-type="float">
            <text:p>4</text:p>
          </table:table-cell>
          <table:table-cell office:value-type="string" calcext:value-type="string">
            <text:p>「音楽」イジンが戦場に置かれたとき、これを寝かせて発動できる。戦場の寝ているイジン1体か寝ているガーディアン1体を墓地に置く。</text:p>
          </table:table-cell>
          <table:table-cell table:style-name="ce8" office:value-type="string" calcext:value-type="string">
            <text:p>1ドローする</text:p>
          </table:table-cell>
          <table:table-cell table:formula="of:=IFERROR(VLOOKUP([.$V333];[$遺業能力番号.$A$1:$遺業能力番号.$B$9];2;0);0)" office:value-type="float" office:value="4" calcext:value-type="float">
            <text:p>4</text:p>
          </table:table-cell>
          <table:table-cell office:value-type="string" calcext:value-type="string">
            <text:p>https://one-draw.jp/ijinden/cardlist/004/card/04_024.png</text:p>
          </table:table-cell>
          <table:table-cell table:formula="of:=CONCATENATE([$JSON.$A$1];[.$C333];[$JSON.$B$1];[.$E333];[$JSON.$C$1];[.$F333];[$JSON.$D$1];IF(ISNA([.$S333]);&quot;null&quot;;&quot;&quot;&quot;&quot;&amp;[.$S333]&amp;&quot;&quot;&quot;&quot;);[$JSON.$E$1];[.$U333];[$JSON.$F$1];IF(ISNA([.$V333]);&quot;null&quot;;&quot;&quot;&quot;&quot;&amp;[.$V333]&amp;&quot;&quot;&quot;&quot;);[$JSON.$G$1];[.$X333];[$JSON.$H$1];[.$H333];[$JSON.$I$1];[.J333];[$JSON.$J$1];[.$L333];[$JSON.$K$1];[.$O333];[$JSON.$L$1];[.$N333];[$JSON.$M$1];[.$R333];[$JSON.$N$1];[.$T333];[$JSON.$O$1];[.$W333];[$JSON.$P$1];[.$A333];[$JSON.$Q$1];[.$B333];[$JSON.$R$1])" office:value-type="string" office:string-value="{&quot;id&quot;:&quot;4-24&quot;,&quot;name&quot;:&quot;クララ・ヨゼフィーネ・シューマン&quot;,&quot;kana&quot;:&quot;くららよぜふぃーねしゅーまん&quot;,&quot;traitText&quot;:&quot;音楽&quot;,&quot;ruleText&quot;:&quot;「音楽」イジンが戦場に置かれたとき、これを寝かせて発動できる。戦場の寝ているイジン1体か寝ているガーディアン1体を墓地に置く。&quot;,&quot;legacyText&quot;:&quot;1ドローする&quot;,&quot;imageUrl&quot;:&quot;https://one-draw.jp/ijinden/cardlist/004/card/04_024.png&quot;,&quot;expansion&quot;:45,&quot;rarity&quot;:1,&quot;type&quot;:1,&quot;level&quot;:3,&quot;color&quot;:4,&quot;term&quot;:0,&quot;trait&quot;:4,&quot;legacy&quot;:4,&quot;orderTable&quot;:333,&quot;orderDeck&quot;:92}," calcext:value-type="string">
            <text:p>{"id":"4-24","name":"クララ・ヨゼフィーネ・シューマン","kana":"くららよぜふぃーねしゅーまん","traitText":"音楽","ruleText":"「音楽」イジンが戦場に置かれたとき、これを寝かせて発動できる。戦場の寝ているイジン1体か寝ているガーディアン1体を墓地に置く。","legacyText":"1ドローする","imageUrl":"https://one-draw.jp/ijinden/cardlist/004/card/04_024.png","expansion":45,"rarity":1,"type":1,"level":3,"color":4,"term":0,"trait":4,"legacy":4,"orderTable":333,"orderDeck":92},</text:p>
          </table:table-cell>
          <table:table-cell table:number-columns-repeated="16347"/>
        </table:table-row>
        <table:table-row table:style-name="ro2">
          <table:table-cell office:value-type="float" office:value="334" calcext:value-type="float">
            <text:p>334</text:p>
          </table:table-cell>
          <table:table-cell office:value-type="float" office:value="170" calcext:value-type="float">
            <text:p>170</text:p>
          </table:table-cell>
          <table:table-cell office:value-type="string" calcext:value-type="string">
            <text:p>4-25</text:p>
          </table:table-cell>
          <table:table-cell office:value-type="float" office:value="25" calcext:value-type="float">
            <text:p>25</text:p>
          </table:table-cell>
          <table:table-cell office:value-type="string" calcext:value-type="string">
            <text:p>間宮林蔵</text:p>
          </table:table-cell>
          <table:table-cell office:value-type="string" calcext:value-type="string">
            <text:p>まみやりんぞう</text:p>
          </table:table-cell>
          <table:table-cell office:value-type="string" calcext:value-type="string">
            <text:p>第４弾ブースターパック</text:p>
          </table:table-cell>
          <table:table-cell table:formula="of:=VLOOKUP([.G334];[$収録番号.$A$1:$収録番号.$B$9];2;0)" office:value-type="float" office:value="45" calcext:value-type="float">
            <text:p>45</text:p>
          </table:table-cell>
          <table:table-cell office:value-type="string" calcext:value-type="string">
            <text:p>N</text:p>
          </table:table-cell>
          <table:table-cell table:formula="of:=VLOOKUP([.I334];[$レアリティ番号.$A$1:$レアリティ番号.$B$4];2;0)" office:value-type="float" office:value="1" calcext:value-type="float">
            <text:p>1</text:p>
          </table:table-cell>
          <table:table-cell office:value-type="string" calcext:value-type="string">
            <text:p>イジン</text:p>
          </table:table-cell>
          <table:table-cell table:formula="of:=VLOOKUP([.K334];[$種類番号.$A$1:$種類番号.$B$4];2;0)" office:value-type="float" office:value="1" calcext:value-type="float">
            <text:p>1</text:p>
          </table:table-cell>
          <table:table-cell office:value-type="string" calcext:value-type="string">
            <text:p>緑</text:p>
          </table:table-cell>
          <table:table-cell table:formula="of:=VLOOKUP([.M334];[$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34];[$特性番号.$A$1:$特性番号.$B$8];2;0);0)" office:value-type="float" office:value="0" calcext:value-type="float">
            <text:p>0</text:p>
          </table:table-cell>
          <table:table-cell office:value-type="string" calcext:value-type="string">
            <text:p>戦場に置かれたとき、戦場のハイケイの色1つにつき1つまで、戦場か魔力ゾーンの裏のカードを手札に戻す。</text:p>
          </table:table-cell>
          <table:table-cell table:style-name="ce8" table:formula="of:=NA()" office:value-type="string" office:string-value="" calcext:value-type="error">
            <text:p>#N/A</text:p>
          </table:table-cell>
          <table:table-cell table:formula="of:=IFERROR(VLOOKUP([.$V334];[$遺業能力番号.$A$1:$遺業能力番号.$B$9];2;0);0)" office:value-type="float" office:value="0" calcext:value-type="float">
            <text:p>0</text:p>
          </table:table-cell>
          <table:table-cell office:value-type="string" calcext:value-type="string">
            <text:p>https://one-draw.jp/ijinden/cardlist/004/card/04_025.png</text:p>
          </table:table-cell>
          <table:table-cell table:formula="of:=CONCATENATE([$JSON.$A$1];[.$C334];[$JSON.$B$1];[.$E334];[$JSON.$C$1];[.$F334];[$JSON.$D$1];IF(ISNA([.$S334]);&quot;null&quot;;&quot;&quot;&quot;&quot;&amp;[.$S334]&amp;&quot;&quot;&quot;&quot;);[$JSON.$E$1];[.$U334];[$JSON.$F$1];IF(ISNA([.$V334]);&quot;null&quot;;&quot;&quot;&quot;&quot;&amp;[.$V334]&amp;&quot;&quot;&quot;&quot;);[$JSON.$G$1];[.$X334];[$JSON.$H$1];[.$H334];[$JSON.$I$1];[.J334];[$JSON.$J$1];[.$L334];[$JSON.$K$1];[.$O334];[$JSON.$L$1];[.$N334];[$JSON.$M$1];[.$R334];[$JSON.$N$1];[.$T334];[$JSON.$O$1];[.$W334];[$JSON.$P$1];[.$A334];[$JSON.$Q$1];[.$B334];[$JSON.$R$1])" office:value-type="string" office:string-value="{&quot;id&quot;:&quot;4-25&quot;,&quot;name&quot;:&quot;間宮林蔵&quot;,&quot;kana&quot;:&quot;まみやりんぞう&quot;,&quot;traitText&quot;:null,&quot;ruleText&quot;:&quot;戦場に置かれたとき、戦場のハイケイの色1つにつき1つまで、戦場か魔力ゾーンの裏のカードを手札に戻す。&quot;,&quot;legacyText&quot;:null,&quot;imageUrl&quot;:&quot;https://one-draw.jp/ijinden/cardlist/004/card/04_025.png&quot;,&quot;expansion&quot;:45,&quot;rarity&quot;:1,&quot;type&quot;:1,&quot;level&quot;:5,&quot;color&quot;:4,&quot;term&quot;:0,&quot;trait&quot;:0,&quot;legacy&quot;:0,&quot;orderTable&quot;:334,&quot;orderDeck&quot;:170}," calcext:value-type="string">
            <text:p>{"id":"4-25","name":"間宮林蔵","kana":"まみやりんぞう","traitText":null,"ruleText":"戦場に置かれたとき、戦場のハイケイの色1つにつき1つまで、戦場か魔力ゾーンの裏のカードを手札に戻す。","legacyText":null,"imageUrl":"https://one-draw.jp/ijinden/cardlist/004/card/04_025.png","expansion":45,"rarity":1,"type":1,"level":5,"color":4,"term":0,"trait":0,"legacy":0,"orderTable":334,"orderDeck":170},</text:p>
          </table:table-cell>
          <table:table-cell table:number-columns-repeated="16347"/>
        </table:table-row>
        <table:table-row table:style-name="ro2">
          <table:table-cell office:value-type="float" office:value="335" calcext:value-type="float">
            <text:p>335</text:p>
          </table:table-cell>
          <table:table-cell office:value-type="float" office:value="51" calcext:value-type="float">
            <text:p>51</text:p>
          </table:table-cell>
          <table:table-cell office:value-type="string" calcext:value-type="string">
            <text:p>4-26</text:p>
          </table:table-cell>
          <table:table-cell office:value-type="float" office:value="26" calcext:value-type="float">
            <text:p>26</text:p>
          </table:table-cell>
          <table:table-cell office:value-type="string" calcext:value-type="string">
            <text:p>徳川斉昭</text:p>
          </table:table-cell>
          <table:table-cell office:value-type="string" calcext:value-type="string">
            <text:p>とくがわなりあき</text:p>
          </table:table-cell>
          <table:table-cell office:value-type="string" calcext:value-type="string">
            <text:p>第４弾ブースターパック</text:p>
          </table:table-cell>
          <table:table-cell table:formula="of:=VLOOKUP([.G335];[$収録番号.$A$1:$収録番号.$B$9];2;0)" office:value-type="float" office:value="45" calcext:value-type="float">
            <text:p>45</text:p>
          </table:table-cell>
          <table:table-cell office:value-type="string" calcext:value-type="string">
            <text:p>N</text:p>
          </table:table-cell>
          <table:table-cell table:formula="of:=VLOOKUP([.I335];[$レアリティ番号.$A$1:$レアリティ番号.$B$4];2;0)" office:value-type="float" office:value="1" calcext:value-type="float">
            <text:p>1</text:p>
          </table:table-cell>
          <table:table-cell office:value-type="string" calcext:value-type="string">
            <text:p>イジン</text:p>
          </table:table-cell>
          <table:table-cell table:formula="of:=VLOOKUP([.K335];[$種類番号.$A$1:$種類番号.$B$4];2;0)" office:value-type="float" office:value="1" calcext:value-type="float">
            <text:p>1</text:p>
          </table:table-cell>
          <table:table-cell office:value-type="string" calcext:value-type="string">
            <text:p>緑</text:p>
          </table:table-cell>
          <table:table-cell table:formula="of:=VLOOKUP([.M335];[$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35];[$特性番号.$A$1:$特性番号.$B$8];2;0);0)" office:value-type="float" office:value="0" calcext:value-type="float">
            <text:p>0</text:p>
          </table:table-cell>
          <table:table-cell office:value-type="string" calcext:value-type="string">
            <text:p>この能力はターンに1回しか発動しない。戦場のイジンが寝たときに発動できる。ターンプレイヤーは1ドローする。</text:p>
          </table:table-cell>
          <table:table-cell table:style-name="ce8" office:value-type="string" calcext:value-type="string">
            <text:p>1ドローする</text:p>
          </table:table-cell>
          <table:table-cell table:formula="of:=IFERROR(VLOOKUP([.$V335];[$遺業能力番号.$A$1:$遺業能力番号.$B$9];2;0);0)" office:value-type="float" office:value="4" calcext:value-type="float">
            <text:p>4</text:p>
          </table:table-cell>
          <table:table-cell office:value-type="string" calcext:value-type="string">
            <text:p>https://one-draw.jp/ijinden/cardlist/004/card/04_026.png</text:p>
          </table:table-cell>
          <table:table-cell table:formula="of:=CONCATENATE([$JSON.$A$1];[.$C335];[$JSON.$B$1];[.$E335];[$JSON.$C$1];[.$F335];[$JSON.$D$1];IF(ISNA([.$S335]);&quot;null&quot;;&quot;&quot;&quot;&quot;&amp;[.$S335]&amp;&quot;&quot;&quot;&quot;);[$JSON.$E$1];[.$U335];[$JSON.$F$1];IF(ISNA([.$V335]);&quot;null&quot;;&quot;&quot;&quot;&quot;&amp;[.$V335]&amp;&quot;&quot;&quot;&quot;);[$JSON.$G$1];[.$X335];[$JSON.$H$1];[.$H335];[$JSON.$I$1];[.J335];[$JSON.$J$1];[.$L335];[$JSON.$K$1];[.$O335];[$JSON.$L$1];[.$N335];[$JSON.$M$1];[.$R335];[$JSON.$N$1];[.$T335];[$JSON.$O$1];[.$W335];[$JSON.$P$1];[.$A335];[$JSON.$Q$1];[.$B335];[$JSON.$R$1])" office:value-type="string" office:string-value="{&quot;id&quot;:&quot;4-26&quot;,&quot;name&quot;:&quot;徳川斉昭&quot;,&quot;kana&quot;:&quot;とくがわなりあき&quot;,&quot;traitText&quot;:null,&quot;ruleText&quot;:&quot;この能力はターンに1回しか発動しない。戦場のイジンが寝たときに発動できる。ターンプレイヤーは1ドローする。&quot;,&quot;legacyText&quot;:&quot;1ドローする&quot;,&quot;imageUrl&quot;:&quot;https://one-draw.jp/ijinden/cardlist/004/card/04_026.png&quot;,&quot;expansion&quot;:45,&quot;rarity&quot;:1,&quot;type&quot;:1,&quot;level&quot;:2,&quot;color&quot;:4,&quot;term&quot;:0,&quot;trait&quot;:0,&quot;legacy&quot;:4,&quot;orderTable&quot;:335,&quot;orderDeck&quot;:51}," calcext:value-type="string">
            <text:p>{"id":"4-26","name":"徳川斉昭","kana":"とくがわなりあき","traitText":null,"ruleText":"この能力はターンに1回しか発動しない。戦場のイジンが寝たときに発動できる。ターンプレイヤーは1ドローする。","legacyText":"1ドローする","imageUrl":"https://one-draw.jp/ijinden/cardlist/004/card/04_026.png","expansion":45,"rarity":1,"type":1,"level":2,"color":4,"term":0,"trait":0,"legacy":4,"orderTable":335,"orderDeck":51},</text:p>
          </table:table-cell>
          <table:table-cell table:number-columns-repeated="16347"/>
        </table:table-row>
        <table:table-row table:style-name="ro2">
          <table:table-cell office:value-type="float" office:value="336" calcext:value-type="float">
            <text:p>336</text:p>
          </table:table-cell>
          <table:table-cell office:value-type="float" office:value="131" calcext:value-type="float">
            <text:p>131</text:p>
          </table:table-cell>
          <table:table-cell office:value-type="string" calcext:value-type="string">
            <text:p>4-27</text:p>
          </table:table-cell>
          <table:table-cell office:value-type="float" office:value="27" calcext:value-type="float">
            <text:p>27</text:p>
          </table:table-cell>
          <table:table-cell office:value-type="string" calcext:value-type="string">
            <text:p>鈴木春信</text:p>
          </table:table-cell>
          <table:table-cell office:value-type="string" calcext:value-type="string">
            <text:p>すずきはるのぶ</text:p>
          </table:table-cell>
          <table:table-cell office:value-type="string" calcext:value-type="string">
            <text:p>第４弾ブースターパック</text:p>
          </table:table-cell>
          <table:table-cell table:formula="of:=VLOOKUP([.G336];[$収録番号.$A$1:$収録番号.$B$9];2;0)" office:value-type="float" office:value="45" calcext:value-type="float">
            <text:p>45</text:p>
          </table:table-cell>
          <table:table-cell office:value-type="string" calcext:value-type="string">
            <text:p>N</text:p>
          </table:table-cell>
          <table:table-cell table:formula="of:=VLOOKUP([.I336];[$レアリティ番号.$A$1:$レアリティ番号.$B$4];2;0)" office:value-type="float" office:value="1" calcext:value-type="float">
            <text:p>1</text:p>
          </table:table-cell>
          <table:table-cell office:value-type="string" calcext:value-type="string">
            <text:p>イジン</text:p>
          </table:table-cell>
          <table:table-cell table:formula="of:=VLOOKUP([.K336];[$種類番号.$A$1:$種類番号.$B$4];2;0)" office:value-type="float" office:value="1" calcext:value-type="float">
            <text:p>1</text:p>
          </table:table-cell>
          <table:table-cell office:value-type="string" calcext:value-type="string">
            <text:p>緑</text:p>
          </table:table-cell>
          <table:table-cell table:formula="of:=VLOOKUP([.M336];[$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6];[$能力語番号.$A$1:$能力語番号.$B$10];2;0);0)" office:value-type="float" office:value="0" calcext:value-type="float">
            <text:p>0</text:p>
          </table:table-cell>
          <table:table-cell office:value-type="string" calcext:value-type="string">
            <text:p>美術</text:p>
          </table:table-cell>
          <table:table-cell table:formula="of:=IFERROR(VLOOKUP([.$S336];[$特性番号.$A$1:$特性番号.$B$8];2;0);0)" office:value-type="float" office:value="2" calcext:value-type="float">
            <text:p>2</text:p>
          </table:table-cell>
          <table:table-cell office:value-type="string" calcext:value-type="string">
            <text:p>戦場に置かれたとき、自分の魔力ゾーンの裏のカード1つを手札に戻して発動できる。自分の山札の上から1枚を裏のまま魔力ゾーンに置く。</text:p>
          </table:table-cell>
          <table:table-cell table:style-name="ce8" office:value-type="string" calcext:value-type="string">
            <text:p>1ドローする</text:p>
          </table:table-cell>
          <table:table-cell table:formula="of:=IFERROR(VLOOKUP([.$V336];[$遺業能力番号.$A$1:$遺業能力番号.$B$9];2;0);0)" office:value-type="float" office:value="4" calcext:value-type="float">
            <text:p>4</text:p>
          </table:table-cell>
          <table:table-cell office:value-type="string" calcext:value-type="string">
            <text:p>https://one-draw.jp/ijinden/cardlist/004/card/04_027.png</text:p>
          </table:table-cell>
          <table:table-cell table:formula="of:=CONCATENATE([$JSON.$A$1];[.$C336];[$JSON.$B$1];[.$E336];[$JSON.$C$1];[.$F336];[$JSON.$D$1];IF(ISNA([.$S336]);&quot;null&quot;;&quot;&quot;&quot;&quot;&amp;[.$S336]&amp;&quot;&quot;&quot;&quot;);[$JSON.$E$1];[.$U336];[$JSON.$F$1];IF(ISNA([.$V336]);&quot;null&quot;;&quot;&quot;&quot;&quot;&amp;[.$V336]&amp;&quot;&quot;&quot;&quot;);[$JSON.$G$1];[.$X336];[$JSON.$H$1];[.$H336];[$JSON.$I$1];[.J336];[$JSON.$J$1];[.$L336];[$JSON.$K$1];[.$O336];[$JSON.$L$1];[.$N336];[$JSON.$M$1];[.$R336];[$JSON.$N$1];[.$T336];[$JSON.$O$1];[.$W336];[$JSON.$P$1];[.$A336];[$JSON.$Q$1];[.$B336];[$JSON.$R$1])" office:value-type="string" office:string-value="{&quot;id&quot;:&quot;4-27&quot;,&quot;name&quot;:&quot;鈴木春信&quot;,&quot;kana&quot;:&quot;すずきはるのぶ&quot;,&quot;traitText&quot;:&quot;美術&quot;,&quot;ruleText&quot;:&quot;戦場に置かれたとき、自分の魔力ゾーンの裏のカード1つを手札に戻して発動できる。自分の山札の上から1枚を裏のまま魔力ゾーンに置く。&quot;,&quot;legacyText&quot;:&quot;1ドローする&quot;,&quot;imageUrl&quot;:&quot;https://one-draw.jp/ijinden/cardlist/004/card/04_027.png&quot;,&quot;expansion&quot;:45,&quot;rarity&quot;:1,&quot;type&quot;:1,&quot;level&quot;:4,&quot;color&quot;:4,&quot;term&quot;:0,&quot;trait&quot;:2,&quot;legacy&quot;:4,&quot;orderTable&quot;:336,&quot;orderDeck&quot;:131}," calcext:value-type="string">
            <text:p>{"id":"4-27","name":"鈴木春信","kana":"すずきはるのぶ","traitText":"美術","ruleText":"戦場に置かれたとき、自分の魔力ゾーンの裏のカード1つを手札に戻して発動できる。自分の山札の上から1枚を裏のまま魔力ゾーンに置く。","legacyText":"1ドローする","imageUrl":"https://one-draw.jp/ijinden/cardlist/004/card/04_027.png","expansion":45,"rarity":1,"type":1,"level":4,"color":4,"term":0,"trait":2,"legacy":4,"orderTable":336,"orderDeck":131},</text:p>
          </table:table-cell>
          <table:table-cell table:number-columns-repeated="16347"/>
        </table:table-row>
        <table:table-row table:style-name="ro2">
          <table:table-cell office:value-type="float" office:value="337" calcext:value-type="float">
            <text:p>337</text:p>
          </table:table-cell>
          <table:table-cell office:value-type="float" office:value="93" calcext:value-type="float">
            <text:p>93</text:p>
          </table:table-cell>
          <table:table-cell office:value-type="string" calcext:value-type="string">
            <text:p>4-28</text:p>
          </table:table-cell>
          <table:table-cell office:value-type="float" office:value="28" calcext:value-type="float">
            <text:p>28</text:p>
          </table:table-cell>
          <table:table-cell office:value-type="string" calcext:value-type="string">
            <text:p>歌川広重</text:p>
          </table:table-cell>
          <table:table-cell office:value-type="string" calcext:value-type="string">
            <text:p>うたがわひろしげ</text:p>
          </table:table-cell>
          <table:table-cell office:value-type="string" calcext:value-type="string">
            <text:p>第４弾ブースターパック</text:p>
          </table:table-cell>
          <table:table-cell table:formula="of:=VLOOKUP([.G337];[$収録番号.$A$1:$収録番号.$B$9];2;0)" office:value-type="float" office:value="45" calcext:value-type="float">
            <text:p>45</text:p>
          </table:table-cell>
          <table:table-cell office:value-type="string" calcext:value-type="string">
            <text:p>R</text:p>
          </table:table-cell>
          <table:table-cell table:formula="of:=VLOOKUP([.I337];[$レアリティ番号.$A$1:$レアリティ番号.$B$4];2;0)" office:value-type="float" office:value="2" calcext:value-type="float">
            <text:p>2</text:p>
          </table:table-cell>
          <table:table-cell office:value-type="string" calcext:value-type="string">
            <text:p>イジン</text:p>
          </table:table-cell>
          <table:table-cell table:formula="of:=VLOOKUP([.K337];[$種類番号.$A$1:$種類番号.$B$4];2;0)" office:value-type="float" office:value="1" calcext:value-type="float">
            <text:p>1</text:p>
          </table:table-cell>
          <table:table-cell office:value-type="string" calcext:value-type="string">
            <text:p>緑</text:p>
          </table:table-cell>
          <table:table-cell table:formula="of:=VLOOKUP([.M337];[$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7];[$能力語番号.$A$1:$能力語番号.$B$10];2;0);0)" office:value-type="float" office:value="0" calcext:value-type="float">
            <text:p>0</text:p>
          </table:table-cell>
          <table:table-cell office:value-type="string" calcext:value-type="string">
            <text:p>美術</text:p>
          </table:table-cell>
          <table:table-cell table:formula="of:=IFERROR(VLOOKUP([.$S337];[$特性番号.$A$1:$特性番号.$B$8];2;0);0)" office:value-type="float" office:value="2" calcext:value-type="float">
            <text:p>2</text:p>
          </table:table-cell>
          <table:table-cell office:value-type="string" calcext:value-type="string">
            <text:p>戦場に置かれたとき、2ドローして、自分の手札のカード2つか「美術」カード1つを墓地に置く。</text:p>
          </table:table-cell>
          <table:table-cell table:style-name="ce8" office:value-type="string" calcext:value-type="string">
            <text:p>1ドローする</text:p>
          </table:table-cell>
          <table:table-cell table:formula="of:=IFERROR(VLOOKUP([.$V337];[$遺業能力番号.$A$1:$遺業能力番号.$B$9];2;0);0)" office:value-type="float" office:value="4" calcext:value-type="float">
            <text:p>4</text:p>
          </table:table-cell>
          <table:table-cell office:value-type="string" calcext:value-type="string">
            <text:p>https://one-draw.jp/ijinden/cardlist/004/card/04_028.png</text:p>
          </table:table-cell>
          <table:table-cell table:formula="of:=CONCATENATE([$JSON.$A$1];[.$C337];[$JSON.$B$1];[.$E337];[$JSON.$C$1];[.$F337];[$JSON.$D$1];IF(ISNA([.$S337]);&quot;null&quot;;&quot;&quot;&quot;&quot;&amp;[.$S337]&amp;&quot;&quot;&quot;&quot;);[$JSON.$E$1];[.$U337];[$JSON.$F$1];IF(ISNA([.$V337]);&quot;null&quot;;&quot;&quot;&quot;&quot;&amp;[.$V337]&amp;&quot;&quot;&quot;&quot;);[$JSON.$G$1];[.$X337];[$JSON.$H$1];[.$H337];[$JSON.$I$1];[.J337];[$JSON.$J$1];[.$L337];[$JSON.$K$1];[.$O337];[$JSON.$L$1];[.$N337];[$JSON.$M$1];[.$R337];[$JSON.$N$1];[.$T337];[$JSON.$O$1];[.$W337];[$JSON.$P$1];[.$A337];[$JSON.$Q$1];[.$B337];[$JSON.$R$1])" office:value-type="string" office:string-value="{&quot;id&quot;:&quot;4-28&quot;,&quot;name&quot;:&quot;歌川広重&quot;,&quot;kana&quot;:&quot;うたがわひろしげ&quot;,&quot;traitText&quot;:&quot;美術&quot;,&quot;ruleText&quot;:&quot;戦場に置かれたとき、2ドローして、自分の手札のカード2つか「美術」カード1つを墓地に置く。&quot;,&quot;legacyText&quot;:&quot;1ドローする&quot;,&quot;imageUrl&quot;:&quot;https://one-draw.jp/ijinden/cardlist/004/card/04_028.png&quot;,&quot;expansion&quot;:45,&quot;rarity&quot;:2,&quot;type&quot;:1,&quot;level&quot;:3,&quot;color&quot;:4,&quot;term&quot;:0,&quot;trait&quot;:2,&quot;legacy&quot;:4,&quot;orderTable&quot;:337,&quot;orderDeck&quot;:93}," calcext:value-type="string">
            <text:p>{"id":"4-28","name":"歌川広重","kana":"うたがわひろしげ","traitText":"美術","ruleText":"戦場に置かれたとき、2ドローして、自分の手札のカード2つか「美術」カード1つを墓地に置く。","legacyText":"1ドローする","imageUrl":"https://one-draw.jp/ijinden/cardlist/004/card/04_028.png","expansion":45,"rarity":2,"type":1,"level":3,"color":4,"term":0,"trait":2,"legacy":4,"orderTable":337,"orderDeck":93},</text:p>
          </table:table-cell>
          <table:table-cell table:number-columns-repeated="16347"/>
        </table:table-row>
        <table:table-row table:style-name="ro2">
          <table:table-cell office:value-type="float" office:value="338" calcext:value-type="float">
            <text:p>338</text:p>
          </table:table-cell>
          <table:table-cell office:value-type="float" office:value="99" calcext:value-type="float">
            <text:p>99</text:p>
          </table:table-cell>
          <table:table-cell office:value-type="string" calcext:value-type="string">
            <text:p>4-29</text:p>
          </table:table-cell>
          <table:table-cell office:value-type="float" office:value="29" calcext:value-type="float">
            <text:p>29</text:p>
          </table:table-cell>
          <table:table-cell office:value-type="string" calcext:value-type="string">
            <text:p>松平容保</text:p>
          </table:table-cell>
          <table:table-cell office:value-type="string" calcext:value-type="string">
            <text:p>まつだいらかたもり</text:p>
          </table:table-cell>
          <table:table-cell office:value-type="string" calcext:value-type="string">
            <text:p>第４弾ブースターパック</text:p>
          </table:table-cell>
          <table:table-cell table:formula="of:=VLOOKUP([.G338];[$収録番号.$A$1:$収録番号.$B$9];2;0)" office:value-type="float" office:value="45" calcext:value-type="float">
            <text:p>45</text:p>
          </table:table-cell>
          <table:table-cell office:value-type="string" calcext:value-type="string">
            <text:p>R</text:p>
          </table:table-cell>
          <table:table-cell table:formula="of:=VLOOKUP([.I338];[$レアリティ番号.$A$1:$レアリティ番号.$B$4];2;0)" office:value-type="float" office:value="2" calcext:value-type="float">
            <text:p>2</text:p>
          </table:table-cell>
          <table:table-cell office:value-type="string" calcext:value-type="string">
            <text:p>イジン</text:p>
          </table:table-cell>
          <table:table-cell table:formula="of:=VLOOKUP([.K338];[$種類番号.$A$1:$種類番号.$B$4];2;0)" office:value-type="float" office:value="1" calcext:value-type="float">
            <text:p>1</text:p>
          </table:table-cell>
          <table:table-cell office:value-type="string" calcext:value-type="string">
            <text:p>黄</text:p>
          </table:table-cell>
          <table:table-cell table:formula="of:=VLOOKUP([.M338];[$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38];[$特性番号.$A$1:$特性番号.$B$8];2;0);0)" office:value-type="float" office:value="0" calcext:value-type="float">
            <text:p>0</text:p>
          </table:table-cell>
          <table:table-cell office:value-type="string" calcext:value-type="string">
            <text:p>スタンド¶戦場に置かれたとき、墓地のマリョクでないカード1つを山札の下に戻して発動できる。1ドローする。</text:p>
          </table:table-cell>
          <table:table-cell table:style-name="ce8" office:value-type="string" calcext:value-type="string">
            <text:p>喪神</text:p>
          </table:table-cell>
          <table:table-cell table:formula="of:=IFERROR(VLOOKUP([.$V338];[$遺業能力番号.$A$1:$遺業能力番号.$B$9];2;0);0)" office:value-type="float" office:value="9" calcext:value-type="float">
            <text:p>9</text:p>
          </table:table-cell>
          <table:table-cell office:value-type="string" calcext:value-type="string">
            <text:p>https://one-draw.jp/ijinden/cardlist/004/card/04_029.png</text:p>
          </table:table-cell>
          <table:table-cell table:formula="of:=CONCATENATE([$JSON.$A$1];[.$C338];[$JSON.$B$1];[.$E338];[$JSON.$C$1];[.$F338];[$JSON.$D$1];IF(ISNA([.$S338]);&quot;null&quot;;&quot;&quot;&quot;&quot;&amp;[.$S338]&amp;&quot;&quot;&quot;&quot;);[$JSON.$E$1];[.$U338];[$JSON.$F$1];IF(ISNA([.$V338]);&quot;null&quot;;&quot;&quot;&quot;&quot;&amp;[.$V338]&amp;&quot;&quot;&quot;&quot;);[$JSON.$G$1];[.$X338];[$JSON.$H$1];[.$H338];[$JSON.$I$1];[.J338];[$JSON.$J$1];[.$L338];[$JSON.$K$1];[.$O338];[$JSON.$L$1];[.$N338];[$JSON.$M$1];[.$R338];[$JSON.$N$1];[.$T338];[$JSON.$O$1];[.$W338];[$JSON.$P$1];[.$A338];[$JSON.$Q$1];[.$B338];[$JSON.$R$1])" office:value-type="string" office:string-value="{&quot;id&quot;:&quot;4-29&quot;,&quot;name&quot;:&quot;松平容保&quot;,&quot;kana&quot;:&quot;まつだいらかたもり&quot;,&quot;traitText&quot;:null,&quot;ruleText&quot;:&quot;スタンド¶戦場に置かれたとき、墓地のマリョクでないカード1つを山札の下に戻して発動できる。1ドローする。&quot;,&quot;legacyText&quot;:&quot;喪神&quot;,&quot;imageUrl&quot;:&quot;https://one-draw.jp/ijinden/cardlist/004/card/04_029.png&quot;,&quot;expansion&quot;:45,&quot;rarity&quot;:2,&quot;type&quot;:1,&quot;level&quot;:3,&quot;color&quot;:8,&quot;term&quot;:0,&quot;trait&quot;:0,&quot;legacy&quot;:9,&quot;orderTable&quot;:338,&quot;orderDeck&quot;:99}," calcext:value-type="string">
            <text:p>{"id":"4-29","name":"松平容保","kana":"まつだいらかたもり","traitText":null,"ruleText":"スタンド¶戦場に置かれたとき、墓地のマリョクでないカード1つを山札の下に戻して発動できる。1ドローする。","legacyText":"喪神","imageUrl":"https://one-draw.jp/ijinden/cardlist/004/card/04_029.png","expansion":45,"rarity":2,"type":1,"level":3,"color":8,"term":0,"trait":0,"legacy":9,"orderTable":338,"orderDeck":99},</text:p>
          </table:table-cell>
          <table:table-cell table:number-columns-repeated="16347"/>
        </table:table-row>
        <table:table-row table:style-name="ro2">
          <table:table-cell office:value-type="float" office:value="339" calcext:value-type="float">
            <text:p>339</text:p>
          </table:table-cell>
          <table:table-cell office:value-type="float" office:value="57" calcext:value-type="float">
            <text:p>57</text:p>
          </table:table-cell>
          <table:table-cell office:value-type="string" calcext:value-type="string">
            <text:p>4-30</text:p>
          </table:table-cell>
          <table:table-cell office:value-type="float" office:value="30" calcext:value-type="float">
            <text:p>30</text:p>
          </table:table-cell>
          <table:table-cell office:value-type="string" calcext:value-type="string">
            <text:p>新島八重</text:p>
          </table:table-cell>
          <table:table-cell office:value-type="string" calcext:value-type="string">
            <text:p>にいじまやえ</text:p>
          </table:table-cell>
          <table:table-cell office:value-type="string" calcext:value-type="string">
            <text:p>第４弾ブースターパック</text:p>
          </table:table-cell>
          <table:table-cell table:formula="of:=VLOOKUP([.G339];[$収録番号.$A$1:$収録番号.$B$9];2;0)" office:value-type="float" office:value="45" calcext:value-type="float">
            <text:p>45</text:p>
          </table:table-cell>
          <table:table-cell office:value-type="string" calcext:value-type="string">
            <text:p>N</text:p>
          </table:table-cell>
          <table:table-cell table:formula="of:=VLOOKUP([.I339];[$レアリティ番号.$A$1:$レアリティ番号.$B$4];2;0)" office:value-type="float" office:value="1" calcext:value-type="float">
            <text:p>1</text:p>
          </table:table-cell>
          <table:table-cell office:value-type="string" calcext:value-type="string">
            <text:p>イジン</text:p>
          </table:table-cell>
          <table:table-cell table:formula="of:=VLOOKUP([.K339];[$種類番号.$A$1:$種類番号.$B$4];2;0)" office:value-type="float" office:value="1" calcext:value-type="float">
            <text:p>1</text:p>
          </table:table-cell>
          <table:table-cell office:value-type="string" calcext:value-type="string">
            <text:p>黄</text:p>
          </table:table-cell>
          <table:table-cell table:formula="of:=VLOOKUP([.M339];[$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39];[$特性番号.$A$1:$特性番号.$B$8];2;0);0)" office:value-type="float" office:value="0" calcext:value-type="float">
            <text:p>0</text:p>
          </table:table-cell>
          <table:table-cell office:value-type="string" calcext:value-type="string">
            <text:p>これが戦場か墓地にいる間、手札のカードを墓地に置く効果を持つ、戦場の能力すべては、発動せず効果を発揮しない。</text:p>
          </table:table-cell>
          <table:table-cell table:style-name="ce8" office:value-type="string" calcext:value-type="string">
            <text:p>1ドローする</text:p>
          </table:table-cell>
          <table:table-cell table:formula="of:=IFERROR(VLOOKUP([.$V339];[$遺業能力番号.$A$1:$遺業能力番号.$B$9];2;0);0)" office:value-type="float" office:value="4" calcext:value-type="float">
            <text:p>4</text:p>
          </table:table-cell>
          <table:table-cell office:value-type="string" calcext:value-type="string">
            <text:p>https://one-draw.jp/ijinden/cardlist/004/card/04_030.png</text:p>
          </table:table-cell>
          <table:table-cell table:formula="of:=CONCATENATE([$JSON.$A$1];[.$C339];[$JSON.$B$1];[.$E339];[$JSON.$C$1];[.$F339];[$JSON.$D$1];IF(ISNA([.$S339]);&quot;null&quot;;&quot;&quot;&quot;&quot;&amp;[.$S339]&amp;&quot;&quot;&quot;&quot;);[$JSON.$E$1];[.$U339];[$JSON.$F$1];IF(ISNA([.$V339]);&quot;null&quot;;&quot;&quot;&quot;&quot;&amp;[.$V339]&amp;&quot;&quot;&quot;&quot;);[$JSON.$G$1];[.$X339];[$JSON.$H$1];[.$H339];[$JSON.$I$1];[.J339];[$JSON.$J$1];[.$L339];[$JSON.$K$1];[.$O339];[$JSON.$L$1];[.$N339];[$JSON.$M$1];[.$R339];[$JSON.$N$1];[.$T339];[$JSON.$O$1];[.$W339];[$JSON.$P$1];[.$A339];[$JSON.$Q$1];[.$B339];[$JSON.$R$1])" office:value-type="string" office:string-value="{&quot;id&quot;:&quot;4-30&quot;,&quot;name&quot;:&quot;新島八重&quot;,&quot;kana&quot;:&quot;にいじまやえ&quot;,&quot;traitText&quot;:null,&quot;ruleText&quot;:&quot;これが戦場か墓地にいる間、手札のカードを墓地に置く効果を持つ、戦場の能力すべては、発動せず効果を発揮しない。&quot;,&quot;legacyText&quot;:&quot;1ドローする&quot;,&quot;imageUrl&quot;:&quot;https://one-draw.jp/ijinden/cardlist/004/card/04_030.png&quot;,&quot;expansion&quot;:45,&quot;rarity&quot;:1,&quot;type&quot;:1,&quot;level&quot;:2,&quot;color&quot;:8,&quot;term&quot;:0,&quot;trait&quot;:0,&quot;legacy&quot;:4,&quot;orderTable&quot;:339,&quot;orderDeck&quot;:57}," calcext:value-type="string">
            <text:p>{"id":"4-30","name":"新島八重","kana":"にいじまやえ","traitText":null,"ruleText":"これが戦場か墓地にいる間、手札のカードを墓地に置く効果を持つ、戦場の能力すべては、発動せず効果を発揮しない。","legacyText":"1ドローする","imageUrl":"https://one-draw.jp/ijinden/cardlist/004/card/04_030.png","expansion":45,"rarity":1,"type":1,"level":2,"color":8,"term":0,"trait":0,"legacy":4,"orderTable":339,"orderDeck":57},</text:p>
          </table:table-cell>
          <table:table-cell table:number-columns-repeated="16347"/>
        </table:table-row>
        <table:table-row table:style-name="ro2">
          <table:table-cell office:value-type="float" office:value="340" calcext:value-type="float">
            <text:p>340</text:p>
          </table:table-cell>
          <table:table-cell office:value-type="float" office:value="176" calcext:value-type="float">
            <text:p>176</text:p>
          </table:table-cell>
          <table:table-cell office:value-type="string" calcext:value-type="string">
            <text:p>4-31</text:p>
          </table:table-cell>
          <table:table-cell office:value-type="float" office:value="31" calcext:value-type="float">
            <text:p>31</text:p>
          </table:table-cell>
          <table:table-cell office:value-type="string" calcext:value-type="string">
            <text:p>尾形光琳</text:p>
          </table:table-cell>
          <table:table-cell office:value-type="string" calcext:value-type="string">
            <text:p>おがたこうりん</text:p>
          </table:table-cell>
          <table:table-cell office:value-type="string" calcext:value-type="string">
            <text:p>第４弾ブースターパック</text:p>
          </table:table-cell>
          <table:table-cell table:formula="of:=VLOOKUP([.G340];[$収録番号.$A$1:$収録番号.$B$9];2;0)" office:value-type="float" office:value="45" calcext:value-type="float">
            <text:p>45</text:p>
          </table:table-cell>
          <table:table-cell office:value-type="string" calcext:value-type="string">
            <text:p>N</text:p>
          </table:table-cell>
          <table:table-cell table:formula="of:=VLOOKUP([.I340];[$レアリティ番号.$A$1:$レアリティ番号.$B$4];2;0)" office:value-type="float" office:value="1" calcext:value-type="float">
            <text:p>1</text:p>
          </table:table-cell>
          <table:table-cell office:value-type="string" calcext:value-type="string">
            <text:p>イジン</text:p>
          </table:table-cell>
          <table:table-cell table:formula="of:=VLOOKUP([.K340];[$種類番号.$A$1:$種類番号.$B$4];2;0)" office:value-type="float" office:value="1" calcext:value-type="float">
            <text:p>1</text:p>
          </table:table-cell>
          <table:table-cell office:value-type="string" calcext:value-type="string">
            <text:p>黄</text:p>
          </table:table-cell>
          <table:table-cell table:formula="of:=VLOOKUP([.M340];[$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0];[$能力語番号.$A$1:$能力語番号.$B$10];2;0);0)" office:value-type="float" office:value="0" calcext:value-type="float">
            <text:p>0</text:p>
          </table:table-cell>
          <table:table-cell office:value-type="string" calcext:value-type="string">
            <text:p>美術</text:p>
          </table:table-cell>
          <table:table-cell table:formula="of:=IFERROR(VLOOKUP([.$S340];[$特性番号.$A$1:$特性番号.$B$8];2;0);0)" office:value-type="float" office:value="2" calcext:value-type="float">
            <text:p>2</text:p>
          </table:table-cell>
          <table:table-cell office:value-type="string" calcext:value-type="string">
            <text:p>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text:p>
          </table:table-cell>
          <table:table-cell table:style-name="ce8" office:value-type="string" calcext:value-type="string">
            <text:p>1ドローする</text:p>
          </table:table-cell>
          <table:table-cell table:formula="of:=IFERROR(VLOOKUP([.$V340];[$遺業能力番号.$A$1:$遺業能力番号.$B$9];2;0);0)" office:value-type="float" office:value="4" calcext:value-type="float">
            <text:p>4</text:p>
          </table:table-cell>
          <table:table-cell office:value-type="string" calcext:value-type="string">
            <text:p>https://one-draw.jp/ijinden/cardlist/004/card/04_031.png</text:p>
          </table:table-cell>
          <table:table-cell table:formula="of:=CONCATENATE([$JSON.$A$1];[.$C340];[$JSON.$B$1];[.$E340];[$JSON.$C$1];[.$F340];[$JSON.$D$1];IF(ISNA([.$S340]);&quot;null&quot;;&quot;&quot;&quot;&quot;&amp;[.$S340]&amp;&quot;&quot;&quot;&quot;);[$JSON.$E$1];[.$U340];[$JSON.$F$1];IF(ISNA([.$V340]);&quot;null&quot;;&quot;&quot;&quot;&quot;&amp;[.$V340]&amp;&quot;&quot;&quot;&quot;);[$JSON.$G$1];[.$X340];[$JSON.$H$1];[.$H340];[$JSON.$I$1];[.J340];[$JSON.$J$1];[.$L340];[$JSON.$K$1];[.$O340];[$JSON.$L$1];[.$N340];[$JSON.$M$1];[.$R340];[$JSON.$N$1];[.$T340];[$JSON.$O$1];[.$W340];[$JSON.$P$1];[.$A340];[$JSON.$Q$1];[.$B340];[$JSON.$R$1])" office:value-type="string" office:string-value="{&quot;id&quot;:&quot;4-31&quot;,&quot;name&quot;:&quot;尾形光琳&quot;,&quot;kana&quot;:&quot;おがたこうりん&quot;,&quot;traitText&quot;:&quot;美術&quot;,&quot;ruleText&quot;:&quot;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quot;,&quot;legacyText&quot;:&quot;1ドローする&quot;,&quot;imageUrl&quot;:&quot;https://one-draw.jp/ijinden/cardlist/004/card/04_031.png&quot;,&quot;expansion&quot;:45,&quot;rarity&quot;:1,&quot;type&quot;:1,&quot;level&quot;:5,&quot;color&quot;:8,&quot;term&quot;:0,&quot;trait&quot;:2,&quot;legacy&quot;:4,&quot;orderTable&quot;:340,&quot;orderDeck&quot;:176}," calcext:value-type="string">
            <text:p>{"id":"4-31","name":"尾形光琳","kana":"おがたこうりん","traitText":"美術","ruleText":"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legacyText":"1ドローする","imageUrl":"https://one-draw.jp/ijinden/cardlist/004/card/04_031.png","expansion":45,"rarity":1,"type":1,"level":5,"color":8,"term":0,"trait":2,"legacy":4,"orderTable":340,"orderDeck":176},</text:p>
          </table:table-cell>
          <table:table-cell table:number-columns-repeated="16347"/>
        </table:table-row>
        <table:table-row table:style-name="ro2">
          <table:table-cell office:value-type="float" office:value="341" calcext:value-type="float">
            <text:p>341</text:p>
          </table:table-cell>
          <table:table-cell office:value-type="float" office:value="100" calcext:value-type="float">
            <text:p>100</text:p>
          </table:table-cell>
          <table:table-cell office:value-type="string" calcext:value-type="string">
            <text:p>4-32</text:p>
          </table:table-cell>
          <table:table-cell office:value-type="float" office:value="32" calcext:value-type="float">
            <text:p>32</text:p>
          </table:table-cell>
          <table:table-cell office:value-type="string" calcext:value-type="string">
            <text:p>滝沢馬琴</text:p>
          </table:table-cell>
          <table:table-cell office:value-type="string" calcext:value-type="string">
            <text:p>たきざわばきん</text:p>
          </table:table-cell>
          <table:table-cell office:value-type="string" calcext:value-type="string">
            <text:p>第４弾ブースターパック</text:p>
          </table:table-cell>
          <table:table-cell table:formula="of:=VLOOKUP([.G341];[$収録番号.$A$1:$収録番号.$B$9];2;0)" office:value-type="float" office:value="45" calcext:value-type="float">
            <text:p>45</text:p>
          </table:table-cell>
          <table:table-cell office:value-type="string" calcext:value-type="string">
            <text:p>N</text:p>
          </table:table-cell>
          <table:table-cell table:formula="of:=VLOOKUP([.I341];[$レアリティ番号.$A$1:$レアリティ番号.$B$4];2;0)" office:value-type="float" office:value="1" calcext:value-type="float">
            <text:p>1</text:p>
          </table:table-cell>
          <table:table-cell office:value-type="string" calcext:value-type="string">
            <text:p>イジン</text:p>
          </table:table-cell>
          <table:table-cell table:formula="of:=VLOOKUP([.K341];[$種類番号.$A$1:$種類番号.$B$4];2;0)" office:value-type="float" office:value="1" calcext:value-type="float">
            <text:p>1</text:p>
          </table:table-cell>
          <table:table-cell office:value-type="string" calcext:value-type="string">
            <text:p>黄</text:p>
          </table:table-cell>
          <table:table-cell table:formula="of:=VLOOKUP([.M341];[$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Q34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341];[$特性番号.$A$1:$特性番号.$B$8];2;0);0)" office:value-type="float" office:value="0" calcext:value-type="float">
            <text:p>0</text:p>
          </table:table-cell>
          <table:table-cell office:value-type="string" calcext:value-type="string">
            <text:p>執筆 - 黄のハイケイが戦場に置かれるたび、1ドローする。</text:p>
          </table:table-cell>
          <table:table-cell table:style-name="ce8" office:value-type="string" calcext:value-type="string">
            <text:p>1ドローする</text:p>
          </table:table-cell>
          <table:table-cell table:formula="of:=IFERROR(VLOOKUP([.$V341];[$遺業能力番号.$A$1:$遺業能力番号.$B$9];2;0);0)" office:value-type="float" office:value="4" calcext:value-type="float">
            <text:p>4</text:p>
          </table:table-cell>
          <table:table-cell office:value-type="string" calcext:value-type="string">
            <text:p>https://one-draw.jp/ijinden/cardlist/004/card/04_032.png</text:p>
          </table:table-cell>
          <table:table-cell table:formula="of:=CONCATENATE([$JSON.$A$1];[.$C341];[$JSON.$B$1];[.$E341];[$JSON.$C$1];[.$F341];[$JSON.$D$1];IF(ISNA([.$S341]);&quot;null&quot;;&quot;&quot;&quot;&quot;&amp;[.$S341]&amp;&quot;&quot;&quot;&quot;);[$JSON.$E$1];[.$U341];[$JSON.$F$1];IF(ISNA([.$V341]);&quot;null&quot;;&quot;&quot;&quot;&quot;&amp;[.$V341]&amp;&quot;&quot;&quot;&quot;);[$JSON.$G$1];[.$X341];[$JSON.$H$1];[.$H341];[$JSON.$I$1];[.J341];[$JSON.$J$1];[.$L341];[$JSON.$K$1];[.$O341];[$JSON.$L$1];[.$N341];[$JSON.$M$1];[.$R341];[$JSON.$N$1];[.$T341];[$JSON.$O$1];[.$W341];[$JSON.$P$1];[.$A341];[$JSON.$Q$1];[.$B341];[$JSON.$R$1])" office:value-type="string" office:string-value="{&quot;id&quot;:&quot;4-32&quot;,&quot;name&quot;:&quot;滝沢馬琴&quot;,&quot;kana&quot;:&quot;たきざわばきん&quot;,&quot;traitText&quot;:null,&quot;ruleText&quot;:&quot;執筆 - 黄のハイケイが戦場に置かれるたび、1ドローする。&quot;,&quot;legacyText&quot;:&quot;1ドローする&quot;,&quot;imageUrl&quot;:&quot;https://one-draw.jp/ijinden/cardlist/004/card/04_032.png&quot;,&quot;expansion&quot;:45,&quot;rarity&quot;:1,&quot;type&quot;:1,&quot;level&quot;:3,&quot;color&quot;:8,&quot;term&quot;:2,&quot;trait&quot;:0,&quot;legacy&quot;:4,&quot;orderTable&quot;:341,&quot;orderDeck&quot;:100}," calcext:value-type="string">
            <text:p>{"id":"4-32","name":"滝沢馬琴","kana":"たきざわばきん","traitText":null,"ruleText":"執筆 - 黄のハイケイが戦場に置かれるたび、1ドローする。","legacyText":"1ドローする","imageUrl":"https://one-draw.jp/ijinden/cardlist/004/card/04_032.png","expansion":45,"rarity":1,"type":1,"level":3,"color":8,"term":2,"trait":0,"legacy":4,"orderTable":341,"orderDeck":100},</text:p>
          </table:table-cell>
          <table:table-cell table:number-columns-repeated="16347"/>
        </table:table-row>
        <table:table-row table:style-name="ro2">
          <table:table-cell office:value-type="float" office:value="342" calcext:value-type="float">
            <text:p>342</text:p>
          </table:table-cell>
          <table:table-cell office:value-type="float" office:value="199" calcext:value-type="float">
            <text:p>199</text:p>
          </table:table-cell>
          <table:table-cell office:value-type="string" calcext:value-type="string">
            <text:p>4-33</text:p>
          </table:table-cell>
          <table:table-cell office:value-type="float" office:value="33" calcext:value-type="float">
            <text:p>33</text:p>
          </table:table-cell>
          <table:table-cell office:value-type="string" calcext:value-type="string">
            <text:p>メアリー・ゴドウィン・シェリー</text:p>
          </table:table-cell>
          <table:table-cell office:value-type="string" calcext:value-type="string">
            <text:p>めありーごどうぃんしぇりー</text:p>
          </table:table-cell>
          <table:table-cell office:value-type="string" calcext:value-type="string">
            <text:p>第４弾ブースターパック</text:p>
          </table:table-cell>
          <table:table-cell table:formula="of:=VLOOKUP([.G342];[$収録番号.$A$1:$収録番号.$B$9];2;0)" office:value-type="float" office:value="45" calcext:value-type="float">
            <text:p>45</text:p>
          </table:table-cell>
          <table:table-cell office:value-type="string" calcext:value-type="string">
            <text:p>R</text:p>
          </table:table-cell>
          <table:table-cell table:formula="of:=VLOOKUP([.I342];[$レアリティ番号.$A$1:$レアリティ番号.$B$4];2;0)" office:value-type="float" office:value="2" calcext:value-type="float">
            <text:p>2</text:p>
          </table:table-cell>
          <table:table-cell office:value-type="string" calcext:value-type="string">
            <text:p>イジン</text:p>
          </table:table-cell>
          <table:table-cell table:formula="of:=VLOOKUP([.K342];[$種類番号.$A$1:$種類番号.$B$4];2;0)" office:value-type="float" office:value="1" calcext:value-type="float">
            <text:p>1</text:p>
          </table:table-cell>
          <table:table-cell office:value-type="string" calcext:value-type="string">
            <text:p>黄</text:p>
          </table:table-cell>
          <table:table-cell table:formula="of:=VLOOKUP([.M342];[$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執筆</text:p>
          </table:table-cell>
          <table:table-cell table:formula="of:=IFERROR(VLOOKUP([.$Q342];[$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342];[$特性番号.$A$1:$特性番号.$B$8];2;0);0)" office:value-type="float" office:value="0" calcext:value-type="float">
            <text:p>0</text:p>
          </table:table-cell>
          <table:table-cell office:value-type="string" calcext:value-type="string">
            <text:p>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text:p>
          </table:table-cell>
          <table:table-cell table:style-name="ce8" office:value-type="string" calcext:value-type="string">
            <text:p>木霊</text:p>
          </table:table-cell>
          <table:table-cell table:formula="of:=IFERROR(VLOOKUP([.$V342];[$遺業能力番号.$A$1:$遺業能力番号.$B$9];2;0);0)" office:value-type="float" office:value="8" calcext:value-type="float">
            <text:p>8</text:p>
          </table:table-cell>
          <table:table-cell office:value-type="string" calcext:value-type="string">
            <text:p>https://one-draw.jp/ijinden/cardlist/004/card/04_033.png</text:p>
          </table:table-cell>
          <table:table-cell table:formula="of:=CONCATENATE([$JSON.$A$1];[.$C342];[$JSON.$B$1];[.$E342];[$JSON.$C$1];[.$F342];[$JSON.$D$1];IF(ISNA([.$S342]);&quot;null&quot;;&quot;&quot;&quot;&quot;&amp;[.$S342]&amp;&quot;&quot;&quot;&quot;);[$JSON.$E$1];[.$U342];[$JSON.$F$1];IF(ISNA([.$V342]);&quot;null&quot;;&quot;&quot;&quot;&quot;&amp;[.$V342]&amp;&quot;&quot;&quot;&quot;);[$JSON.$G$1];[.$X342];[$JSON.$H$1];[.$H342];[$JSON.$I$1];[.J342];[$JSON.$J$1];[.$L342];[$JSON.$K$1];[.$O342];[$JSON.$L$1];[.$N342];[$JSON.$M$1];[.$R342];[$JSON.$N$1];[.$T342];[$JSON.$O$1];[.$W342];[$JSON.$P$1];[.$A342];[$JSON.$Q$1];[.$B342];[$JSON.$R$1])" office:value-type="string" office:string-value="{&quot;id&quot;:&quot;4-33&quot;,&quot;name&quot;:&quot;メアリー・ゴドウィン・シェリー&quot;,&quot;kana&quot;:&quot;めありーごどうぃんしぇりー&quot;,&quot;traitText&quot;:null,&quot;ruleText&quot;:&quot;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quot;,&quot;legacyText&quot;:&quot;木霊&quot;,&quot;imageUrl&quot;:&quot;https://one-draw.jp/ijinden/cardlist/004/card/04_033.png&quot;,&quot;expansion&quot;:45,&quot;rarity&quot;:2,&quot;type&quot;:1,&quot;level&quot;:6,&quot;color&quot;:8,&quot;term&quot;:2,&quot;trait&quot;:0,&quot;legacy&quot;:8,&quot;orderTable&quot;:342,&quot;orderDeck&quot;:199}," calcext:value-type="string">
            <text:p>{"id":"4-33","name":"メアリー・ゴドウィン・シェリー","kana":"めありーごどうぃんしぇりー","traitText":null,"ruleText":"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legacyText":"木霊","imageUrl":"https://one-draw.jp/ijinden/cardlist/004/card/04_033.png","expansion":45,"rarity":2,"type":1,"level":6,"color":8,"term":2,"trait":0,"legacy":8,"orderTable":342,"orderDeck":199},</text:p>
          </table:table-cell>
          <table:table-cell table:number-columns-repeated="16347"/>
        </table:table-row>
        <table:table-row table:style-name="ro2">
          <table:table-cell office:value-type="float" office:value="343" calcext:value-type="float">
            <text:p>343</text:p>
          </table:table-cell>
          <table:table-cell office:value-type="float" office:value="138" calcext:value-type="float">
            <text:p>138</text:p>
          </table:table-cell>
          <table:table-cell office:value-type="string" calcext:value-type="string">
            <text:p>4-34</text:p>
          </table:table-cell>
          <table:table-cell office:value-type="float" office:value="34" calcext:value-type="float">
            <text:p>34</text:p>
          </table:table-cell>
          <table:table-cell office:value-type="string" calcext:value-type="string">
            <text:p>西郷頼母</text:p>
          </table:table-cell>
          <table:table-cell office:value-type="string" calcext:value-type="string">
            <text:p>さいごうたのも</text:p>
          </table:table-cell>
          <table:table-cell office:value-type="string" calcext:value-type="string">
            <text:p>第４弾ブースターパック</text:p>
          </table:table-cell>
          <table:table-cell table:formula="of:=VLOOKUP([.G343];[$収録番号.$A$1:$収録番号.$B$9];2;0)" office:value-type="float" office:value="45" calcext:value-type="float">
            <text:p>45</text:p>
          </table:table-cell>
          <table:table-cell office:value-type="string" calcext:value-type="string">
            <text:p>N</text:p>
          </table:table-cell>
          <table:table-cell table:formula="of:=VLOOKUP([.I343];[$レアリティ番号.$A$1:$レアリティ番号.$B$4];2;0)" office:value-type="float" office:value="1" calcext:value-type="float">
            <text:p>1</text:p>
          </table:table-cell>
          <table:table-cell office:value-type="string" calcext:value-type="string">
            <text:p>イジン</text:p>
          </table:table-cell>
          <table:table-cell table:formula="of:=VLOOKUP([.K343];[$種類番号.$A$1:$種類番号.$B$4];2;0)" office:value-type="float" office:value="1" calcext:value-type="float">
            <text:p>1</text:p>
          </table:table-cell>
          <table:table-cell office:value-type="string" calcext:value-type="string">
            <text:p>黄</text:p>
          </table:table-cell>
          <table:table-cell table:formula="of:=VLOOKUP([.M343];[$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43];[$特性番号.$A$1:$特性番号.$B$8];2;0);0)" office:value-type="float" office:value="0" calcext:value-type="float">
            <text:p>0</text:p>
          </table:table-cell>
          <table:table-cell office:value-type="string" calcext:value-type="string">
            <text:p>ウォッチャー¶自分の戦場の他のイジンが破壊されるたびに発動する。このターンに限り「パワー+1000」を得る。</text:p>
          </table:table-cell>
          <table:table-cell table:style-name="ce8" office:value-type="string" calcext:value-type="string">
            <text:p>1ドローする</text:p>
          </table:table-cell>
          <table:table-cell table:formula="of:=IFERROR(VLOOKUP([.$V343];[$遺業能力番号.$A$1:$遺業能力番号.$B$9];2;0);0)" office:value-type="float" office:value="4" calcext:value-type="float">
            <text:p>4</text:p>
          </table:table-cell>
          <table:table-cell office:value-type="string" calcext:value-type="string">
            <text:p>https://one-draw.jp/ijinden/cardlist/004/card/04_034.png</text:p>
          </table:table-cell>
          <table:table-cell table:formula="of:=CONCATENATE([$JSON.$A$1];[.$C343];[$JSON.$B$1];[.$E343];[$JSON.$C$1];[.$F343];[$JSON.$D$1];IF(ISNA([.$S343]);&quot;null&quot;;&quot;&quot;&quot;&quot;&amp;[.$S343]&amp;&quot;&quot;&quot;&quot;);[$JSON.$E$1];[.$U343];[$JSON.$F$1];IF(ISNA([.$V343]);&quot;null&quot;;&quot;&quot;&quot;&quot;&amp;[.$V343]&amp;&quot;&quot;&quot;&quot;);[$JSON.$G$1];[.$X343];[$JSON.$H$1];[.$H343];[$JSON.$I$1];[.J343];[$JSON.$J$1];[.$L343];[$JSON.$K$1];[.$O343];[$JSON.$L$1];[.$N343];[$JSON.$M$1];[.$R343];[$JSON.$N$1];[.$T343];[$JSON.$O$1];[.$W343];[$JSON.$P$1];[.$A343];[$JSON.$Q$1];[.$B343];[$JSON.$R$1])" office:value-type="string" office:string-value="{&quot;id&quot;:&quot;4-34&quot;,&quot;name&quot;:&quot;西郷頼母&quot;,&quot;kana&quot;:&quot;さいごうたのも&quot;,&quot;traitText&quot;:null,&quot;ruleText&quot;:&quot;ウォッチャー¶自分の戦場の他のイジンが破壊されるたびに発動する。このターンに限り「パワー+1000」を得る。&quot;,&quot;legacyText&quot;:&quot;1ドローする&quot;,&quot;imageUrl&quot;:&quot;https://one-draw.jp/ijinden/cardlist/004/card/04_034.png&quot;,&quot;expansion&quot;:45,&quot;rarity&quot;:1,&quot;type&quot;:1,&quot;level&quot;:4,&quot;color&quot;:8,&quot;term&quot;:0,&quot;trait&quot;:0,&quot;legacy&quot;:4,&quot;orderTable&quot;:343,&quot;orderDeck&quot;:138}," calcext:value-type="string">
            <text:p>{"id":"4-34","name":"西郷頼母","kana":"さいごうたのも","traitText":null,"ruleText":"ウォッチャー¶自分の戦場の他のイジンが破壊されるたびに発動する。このターンに限り「パワー+1000」を得る。","legacyText":"1ドローする","imageUrl":"https://one-draw.jp/ijinden/cardlist/004/card/04_034.png","expansion":45,"rarity":1,"type":1,"level":4,"color":8,"term":0,"trait":0,"legacy":4,"orderTable":343,"orderDeck":138},</text:p>
          </table:table-cell>
          <table:table-cell table:number-columns-repeated="16347"/>
        </table:table-row>
        <table:table-row table:style-name="ro2">
          <table:table-cell office:value-type="float" office:value="344" calcext:value-type="float">
            <text:p>344</text:p>
          </table:table-cell>
          <table:table-cell office:value-type="float" office:value="61" calcext:value-type="float">
            <text:p>61</text:p>
          </table:table-cell>
          <table:table-cell office:value-type="string" calcext:value-type="string">
            <text:p>4-35</text:p>
          </table:table-cell>
          <table:table-cell office:value-type="float" office:value="35" calcext:value-type="float">
            <text:p>35</text:p>
          </table:table-cell>
          <table:table-cell office:value-type="string" calcext:value-type="string">
            <text:p>沖田総司</text:p>
          </table:table-cell>
          <table:table-cell office:value-type="string" calcext:value-type="string">
            <text:p>おきたそうじ</text:p>
          </table:table-cell>
          <table:table-cell office:value-type="string" calcext:value-type="string">
            <text:p>第４弾ブースターパック</text:p>
          </table:table-cell>
          <table:table-cell table:formula="of:=VLOOKUP([.G344];[$収録番号.$A$1:$収録番号.$B$9];2;0)" office:value-type="float" office:value="45" calcext:value-type="float">
            <text:p>45</text:p>
          </table:table-cell>
          <table:table-cell office:value-type="string" calcext:value-type="string">
            <text:p>R</text:p>
          </table:table-cell>
          <table:table-cell table:formula="of:=VLOOKUP([.I344];[$レアリティ番号.$A$1:$レアリティ番号.$B$4];2;0)" office:value-type="float" office:value="2" calcext:value-type="float">
            <text:p>2</text:p>
          </table:table-cell>
          <table:table-cell office:value-type="string" calcext:value-type="string">
            <text:p>イジン</text:p>
          </table:table-cell>
          <table:table-cell table:formula="of:=VLOOKUP([.K344];[$種類番号.$A$1:$種類番号.$B$4];2;0)" office:value-type="float" office:value="1" calcext:value-type="float">
            <text:p>1</text:p>
          </table:table-cell>
          <table:table-cell office:value-type="string" calcext:value-type="string">
            <text:p>紫</text:p>
          </table:table-cell>
          <table:table-cell table:formula="of:=VLOOKUP([.M344];[$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4];[$能力語番号.$A$1:$能力語番号.$B$10];2;0);0)" office:value-type="float" office:value="0" calcext:value-type="float">
            <text:p>0</text:p>
          </table:table-cell>
          <table:table-cell office:value-type="string" calcext:value-type="string">
            <text:p>剣術 志願</text:p>
          </table:table-cell>
          <table:table-cell table:formula="of:=IFERROR(VLOOKUP([.$S344];[$特性番号.$A$1:$特性番号.$B$8];2;0);0)" office:value-type="float" office:value="33" calcext:value-type="float">
            <text:p>33</text:p>
          </table:table-cell>
          <table:table-cell office:value-type="string" calcext:value-type="string">
            <text:p>戦場に置かれたとき、ガーディアンが自分の戦場にいないなら、戦場のレベル5以上のイジン1体を指定して発動できる。そのイジンを破壊する。¶アタッカーになったとき、相手の山札の上から2枚を墓地に置く。</text:p>
          </table:table-cell>
          <table:table-cell table:style-name="ce8" office:value-type="string" calcext:value-type="string">
            <text:p>1ドローする</text:p>
          </table:table-cell>
          <table:table-cell table:formula="of:=IFERROR(VLOOKUP([.$V344];[$遺業能力番号.$A$1:$遺業能力番号.$B$9];2;0);0)" office:value-type="float" office:value="4" calcext:value-type="float">
            <text:p>4</text:p>
          </table:table-cell>
          <table:table-cell office:value-type="string" calcext:value-type="string">
            <text:p>https://one-draw.jp/ijinden/cardlist/004/card/04_035.png</text:p>
          </table:table-cell>
          <table:table-cell table:formula="of:=CONCATENATE([$JSON.$A$1];[.$C344];[$JSON.$B$1];[.$E344];[$JSON.$C$1];[.$F344];[$JSON.$D$1];IF(ISNA([.$S344]);&quot;null&quot;;&quot;&quot;&quot;&quot;&amp;[.$S344]&amp;&quot;&quot;&quot;&quot;);[$JSON.$E$1];[.$U344];[$JSON.$F$1];IF(ISNA([.$V344]);&quot;null&quot;;&quot;&quot;&quot;&quot;&amp;[.$V344]&amp;&quot;&quot;&quot;&quot;);[$JSON.$G$1];[.$X344];[$JSON.$H$1];[.$H344];[$JSON.$I$1];[.J344];[$JSON.$J$1];[.$L344];[$JSON.$K$1];[.$O344];[$JSON.$L$1];[.$N344];[$JSON.$M$1];[.$R344];[$JSON.$N$1];[.$T344];[$JSON.$O$1];[.$W344];[$JSON.$P$1];[.$A344];[$JSON.$Q$1];[.$B344];[$JSON.$R$1])" office:value-type="string" office:string-value="{&quot;id&quot;:&quot;4-35&quot;,&quot;name&quot;:&quot;沖田総司&quot;,&quot;kana&quot;:&quot;おきたそうじ&quot;,&quot;traitText&quot;:&quot;剣術 志願&quot;,&quot;ruleText&quot;:&quot;戦場に置かれたとき、ガーディアンが自分の戦場にいないなら、戦場のレベル5以上のイジン1体を指定して発動できる。そのイジンを破壊する。¶アタッカーになったとき、相手の山札の上から2枚を墓地に置く。&quot;,&quot;legacyText&quot;:&quot;1ドローする&quot;,&quot;imageUrl&quot;:&quot;https://one-draw.jp/ijinden/cardlist/004/card/04_035.png&quot;,&quot;expansion&quot;:45,&quot;rarity&quot;:2,&quot;type&quot;:1,&quot;level&quot;:2,&quot;color&quot;:16,&quot;term&quot;:0,&quot;trait&quot;:33,&quot;legacy&quot;:4,&quot;orderTable&quot;:344,&quot;orderDeck&quot;:61}," calcext:value-type="string">
            <text:p>{"id":"4-35","name":"沖田総司","kana":"おきたそうじ","traitText":"剣術 志願","ruleText":"戦場に置かれたとき、ガーディアンが自分の戦場にいないなら、戦場のレベル5以上のイジン1体を指定して発動できる。そのイジンを破壊する。¶アタッカーになったとき、相手の山札の上から2枚を墓地に置く。","legacyText":"1ドローする","imageUrl":"https://one-draw.jp/ijinden/cardlist/004/card/04_035.png","expansion":45,"rarity":2,"type":1,"level":2,"color":16,"term":0,"trait":33,"legacy":4,"orderTable":344,"orderDeck":61},</text:p>
          </table:table-cell>
          <table:table-cell table:number-columns-repeated="16347"/>
        </table:table-row>
        <table:table-row table:style-name="ro2">
          <table:table-cell office:value-type="float" office:value="345" calcext:value-type="float">
            <text:p>345</text:p>
          </table:table-cell>
          <table:table-cell office:value-type="float" office:value="23" calcext:value-type="float">
            <text:p>23</text:p>
          </table:table-cell>
          <table:table-cell office:value-type="string" calcext:value-type="string">
            <text:p>4-36</text:p>
          </table:table-cell>
          <table:table-cell office:value-type="float" office:value="36" calcext:value-type="float">
            <text:p>36</text:p>
          </table:table-cell>
          <table:table-cell office:value-type="string" calcext:value-type="string">
            <text:p>ジョバンニ＝ディ＝メディチ</text:p>
          </table:table-cell>
          <table:table-cell office:value-type="string" calcext:value-type="string">
            <text:p>じょばんにでぃめでぃち</text:p>
          </table:table-cell>
          <table:table-cell office:value-type="string" calcext:value-type="string">
            <text:p>第４弾ブースターパック</text:p>
          </table:table-cell>
          <table:table-cell table:formula="of:=VLOOKUP([.G345];[$収録番号.$A$1:$収録番号.$B$9];2;0)" office:value-type="float" office:value="45" calcext:value-type="float">
            <text:p>45</text:p>
          </table:table-cell>
          <table:table-cell office:value-type="string" calcext:value-type="string">
            <text:p>N</text:p>
          </table:table-cell>
          <table:table-cell table:formula="of:=VLOOKUP([.I345];[$レアリティ番号.$A$1:$レアリティ番号.$B$4];2;0)" office:value-type="float" office:value="1" calcext:value-type="float">
            <text:p>1</text:p>
          </table:table-cell>
          <table:table-cell office:value-type="string" calcext:value-type="string">
            <text:p>イジン</text:p>
          </table:table-cell>
          <table:table-cell table:formula="of:=VLOOKUP([.K345];[$種類番号.$A$1:$種類番号.$B$4];2;0)" office:value-type="float" office:value="1" calcext:value-type="float">
            <text:p>1</text:p>
          </table:table-cell>
          <table:table-cell office:value-type="string" calcext:value-type="string">
            <text:p>紫</text:p>
          </table:table-cell>
          <table:table-cell table:formula="of:=VLOOKUP([.M345];[$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45];[$特性番号.$A$1:$特性番号.$B$8];2;0);0)" office:value-type="float" office:value="0" calcext:value-type="float">
            <text:p>0</text:p>
          </table:table-cell>
          <table:table-cell office:value-type="string" calcext:value-type="string">
            <text:p>戦場に置かれたとき、自分の山札の上から1枚を裏のまま魔力ゾーンに置いて、2ドローする。¶戦場から墓地に置かれたとき、カードが自分の墓地に5つ以上あるなら、ゲームに敗北する。</text:p>
          </table:table-cell>
          <table:table-cell table:style-name="ce8" table:formula="of:=NA()" office:value-type="string" office:string-value="" calcext:value-type="error">
            <text:p>#N/A</text:p>
          </table:table-cell>
          <table:table-cell table:formula="of:=IFERROR(VLOOKUP([.$V345];[$遺業能力番号.$A$1:$遺業能力番号.$B$9];2;0);0)" office:value-type="float" office:value="0" calcext:value-type="float">
            <text:p>0</text:p>
          </table:table-cell>
          <table:table-cell office:value-type="string" calcext:value-type="string">
            <text:p>https://one-draw.jp/ijinden/cardlist/004/card/04_036.png</text:p>
          </table:table-cell>
          <table:table-cell table:formula="of:=CONCATENATE([$JSON.$A$1];[.$C345];[$JSON.$B$1];[.$E345];[$JSON.$C$1];[.$F345];[$JSON.$D$1];IF(ISNA([.$S345]);&quot;null&quot;;&quot;&quot;&quot;&quot;&amp;[.$S345]&amp;&quot;&quot;&quot;&quot;);[$JSON.$E$1];[.$U345];[$JSON.$F$1];IF(ISNA([.$V345]);&quot;null&quot;;&quot;&quot;&quot;&quot;&amp;[.$V345]&amp;&quot;&quot;&quot;&quot;);[$JSON.$G$1];[.$X345];[$JSON.$H$1];[.$H345];[$JSON.$I$1];[.J345];[$JSON.$J$1];[.$L345];[$JSON.$K$1];[.$O345];[$JSON.$L$1];[.$N345];[$JSON.$M$1];[.$R345];[$JSON.$N$1];[.$T345];[$JSON.$O$1];[.$W345];[$JSON.$P$1];[.$A345];[$JSON.$Q$1];[.$B345];[$JSON.$R$1])" office:value-type="string" office:string-value="{&quot;id&quot;:&quot;4-36&quot;,&quot;name&quot;:&quot;ジョバンニ＝ディ＝メディチ&quot;,&quot;kana&quot;:&quot;じょばんにでぃめでぃち&quot;,&quot;traitText&quot;:null,&quot;ruleText&quot;:&quot;戦場に置かれたとき、自分の山札の上から1枚を裏のまま魔力ゾーンに置いて、2ドローする。¶戦場から墓地に置かれたとき、カードが自分の墓地に5つ以上あるなら、ゲームに敗北する。&quot;,&quot;legacyText&quot;:null,&quot;imageUrl&quot;:&quot;https://one-draw.jp/ijinden/cardlist/004/card/04_036.png&quot;,&quot;expansion&quot;:45,&quot;rarity&quot;:1,&quot;type&quot;:1,&quot;level&quot;:1,&quot;color&quot;:16,&quot;term&quot;:0,&quot;trait&quot;:0,&quot;legacy&quot;:0,&quot;orderTable&quot;:345,&quot;orderDeck&quot;:23}," calcext:value-type="string">
            <text:p>{"id":"4-36","name":"ジョバンニ＝ディ＝メディチ","kana":"じょばんにでぃめでぃち","traitText":null,"ruleText":"戦場に置かれたとき、自分の山札の上から1枚を裏のまま魔力ゾーンに置いて、2ドローする。¶戦場から墓地に置かれたとき、カードが自分の墓地に5つ以上あるなら、ゲームに敗北する。","legacyText":null,"imageUrl":"https://one-draw.jp/ijinden/cardlist/004/card/04_036.png","expansion":45,"rarity":1,"type":1,"level":1,"color":16,"term":0,"trait":0,"legacy":0,"orderTable":345,"orderDeck":23},</text:p>
          </table:table-cell>
          <table:table-cell table:number-columns-repeated="16347"/>
        </table:table-row>
        <table:table-row table:style-name="ro2">
          <table:table-cell office:value-type="float" office:value="346" calcext:value-type="float">
            <text:p>346</text:p>
          </table:table-cell>
          <table:table-cell office:value-type="float" office:value="62" calcext:value-type="float">
            <text:p>62</text:p>
          </table:table-cell>
          <table:table-cell office:value-type="string" calcext:value-type="string">
            <text:p>4-37</text:p>
          </table:table-cell>
          <table:table-cell office:value-type="float" office:value="37" calcext:value-type="float">
            <text:p>37</text:p>
          </table:table-cell>
          <table:table-cell office:value-type="string" calcext:value-type="string">
            <text:p>フローレンス・ナイチンゲール</text:p>
          </table:table-cell>
          <table:table-cell office:value-type="string" calcext:value-type="string">
            <text:p>ふろーれんすないちんげーる</text:p>
          </table:table-cell>
          <table:table-cell office:value-type="string" calcext:value-type="string">
            <text:p>第４弾ブースターパック</text:p>
          </table:table-cell>
          <table:table-cell table:formula="of:=VLOOKUP([.G346];[$収録番号.$A$1:$収録番号.$B$9];2;0)" office:value-type="float" office:value="45" calcext:value-type="float">
            <text:p>45</text:p>
          </table:table-cell>
          <table:table-cell office:value-type="string" calcext:value-type="string">
            <text:p>R</text:p>
          </table:table-cell>
          <table:table-cell table:formula="of:=VLOOKUP([.I346];[$レアリティ番号.$A$1:$レアリティ番号.$B$4];2;0)" office:value-type="float" office:value="2" calcext:value-type="float">
            <text:p>2</text:p>
          </table:table-cell>
          <table:table-cell office:value-type="string" calcext:value-type="string">
            <text:p>イジン</text:p>
          </table:table-cell>
          <table:table-cell table:formula="of:=VLOOKUP([.K346];[$種類番号.$A$1:$種類番号.$B$4];2;0)" office:value-type="float" office:value="1" calcext:value-type="float">
            <text:p>1</text:p>
          </table:table-cell>
          <table:table-cell office:value-type="string" calcext:value-type="string">
            <text:p>紫</text:p>
          </table:table-cell>
          <table:table-cell table:formula="of:=VLOOKUP([.M346];[$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6];[$能力語番号.$A$1:$能力語番号.$B$10];2;0);0)" office:value-type="float" office:value="0" calcext:value-type="float">
            <text:p>0</text:p>
          </table:table-cell>
          <table:table-cell office:value-type="string" calcext:value-type="string">
            <text:p>医術</text:p>
          </table:table-cell>
          <table:table-cell table:formula="of:=IFERROR(VLOOKUP([.$S346];[$特性番号.$A$1:$特性番号.$B$8];2;0);0)" office:value-type="float" office:value="16" calcext:value-type="float">
            <text:p>16</text:p>
          </table:table-cell>
          <table:table-cell office:value-type="string" calcext:value-type="string">
            <text:p>墓地から戦場に置かれたとき、自分の山札の上から1枚を裏のまま戦場に置く。</text:p>
          </table:table-cell>
          <table:table-cell table:style-name="ce8" office:value-type="string" calcext:value-type="string">
            <text:p>反魂</text:p>
          </table:table-cell>
          <table:table-cell table:formula="of:=IFERROR(VLOOKUP([.$V346];[$遺業能力番号.$A$1:$遺業能力番号.$B$9];2;0);0)" office:value-type="float" office:value="6" calcext:value-type="float">
            <text:p>6</text:p>
          </table:table-cell>
          <table:table-cell office:value-type="string" calcext:value-type="string">
            <text:p>https://one-draw.jp/ijinden/cardlist/004/card/04_037.png</text:p>
          </table:table-cell>
          <table:table-cell table:formula="of:=CONCATENATE([$JSON.$A$1];[.$C346];[$JSON.$B$1];[.$E346];[$JSON.$C$1];[.$F346];[$JSON.$D$1];IF(ISNA([.$S346]);&quot;null&quot;;&quot;&quot;&quot;&quot;&amp;[.$S346]&amp;&quot;&quot;&quot;&quot;);[$JSON.$E$1];[.$U346];[$JSON.$F$1];IF(ISNA([.$V346]);&quot;null&quot;;&quot;&quot;&quot;&quot;&amp;[.$V346]&amp;&quot;&quot;&quot;&quot;);[$JSON.$G$1];[.$X346];[$JSON.$H$1];[.$H346];[$JSON.$I$1];[.J346];[$JSON.$J$1];[.$L346];[$JSON.$K$1];[.$O346];[$JSON.$L$1];[.$N346];[$JSON.$M$1];[.$R346];[$JSON.$N$1];[.$T346];[$JSON.$O$1];[.$W346];[$JSON.$P$1];[.$A346];[$JSON.$Q$1];[.$B346];[$JSON.$R$1])" office:value-type="string" office:string-value="{&quot;id&quot;:&quot;4-37&quot;,&quot;name&quot;:&quot;フローレンス・ナイチンゲール&quot;,&quot;kana&quot;:&quot;ふろーれんすないちんげーる&quot;,&quot;traitText&quot;:&quot;医術&quot;,&quot;ruleText&quot;:&quot;墓地から戦場に置かれたとき、自分の山札の上から1枚を裏のまま戦場に置く。&quot;,&quot;legacyText&quot;:&quot;反魂&quot;,&quot;imageUrl&quot;:&quot;https://one-draw.jp/ijinden/cardlist/004/card/04_037.png&quot;,&quot;expansion&quot;:45,&quot;rarity&quot;:2,&quot;type&quot;:1,&quot;level&quot;:2,&quot;color&quot;:16,&quot;term&quot;:0,&quot;trait&quot;:16,&quot;legacy&quot;:6,&quot;orderTable&quot;:346,&quot;orderDeck&quot;:62}," calcext:value-type="string">
            <text:p>{"id":"4-37","name":"フローレンス・ナイチンゲール","kana":"ふろーれんすないちんげーる","traitText":"医術","ruleText":"墓地から戦場に置かれたとき、自分の山札の上から1枚を裏のまま戦場に置く。","legacyText":"反魂","imageUrl":"https://one-draw.jp/ijinden/cardlist/004/card/04_037.png","expansion":45,"rarity":2,"type":1,"level":2,"color":16,"term":0,"trait":16,"legacy":6,"orderTable":346,"orderDeck":62},</text:p>
          </table:table-cell>
          <table:table-cell table:number-columns-repeated="16347"/>
        </table:table-row>
        <table:table-row table:style-name="ro2">
          <table:table-cell office:value-type="float" office:value="347" calcext:value-type="float">
            <text:p>347</text:p>
          </table:table-cell>
          <table:table-cell office:value-type="float" office:value="179" calcext:value-type="float">
            <text:p>179</text:p>
          </table:table-cell>
          <table:table-cell office:value-type="string" calcext:value-type="string">
            <text:p>4-38</text:p>
          </table:table-cell>
          <table:table-cell office:value-type="float" office:value="38" calcext:value-type="float">
            <text:p>38</text:p>
          </table:table-cell>
          <table:table-cell office:value-type="string" calcext:value-type="string">
            <text:p>ミシェル・ノストラダムス</text:p>
          </table:table-cell>
          <table:table-cell office:value-type="string" calcext:value-type="string">
            <text:p>みしぇるのすとらだむす</text:p>
          </table:table-cell>
          <table:table-cell office:value-type="string" calcext:value-type="string">
            <text:p>第４弾ブースターパック</text:p>
          </table:table-cell>
          <table:table-cell table:formula="of:=VLOOKUP([.G347];[$収録番号.$A$1:$収録番号.$B$9];2;0)" office:value-type="float" office:value="45" calcext:value-type="float">
            <text:p>45</text:p>
          </table:table-cell>
          <table:table-cell office:value-type="string" calcext:value-type="string">
            <text:p>N</text:p>
          </table:table-cell>
          <table:table-cell table:formula="of:=VLOOKUP([.I347];[$レアリティ番号.$A$1:$レアリティ番号.$B$4];2;0)" office:value-type="float" office:value="1" calcext:value-type="float">
            <text:p>1</text:p>
          </table:table-cell>
          <table:table-cell office:value-type="string" calcext:value-type="string">
            <text:p>イジン</text:p>
          </table:table-cell>
          <table:table-cell table:formula="of:=VLOOKUP([.K347];[$種類番号.$A$1:$種類番号.$B$4];2;0)" office:value-type="float" office:value="1" calcext:value-type="float">
            <text:p>1</text:p>
          </table:table-cell>
          <table:table-cell office:value-type="string" calcext:value-type="string">
            <text:p>紫</text:p>
          </table:table-cell>
          <table:table-cell table:formula="of:=VLOOKUP([.M347];[$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7];[$能力語番号.$A$1:$能力語番号.$B$10];2;0);0)" office:value-type="float" office:value="0" calcext:value-type="float">
            <text:p>0</text:p>
          </table:table-cell>
          <table:table-cell office:value-type="string" calcext:value-type="string">
            <text:p>医術</text:p>
          </table:table-cell>
          <table:table-cell table:formula="of:=IFERROR(VLOOKUP([.$S347];[$特性番号.$A$1:$特性番号.$B$8];2;0);0)" office:value-type="float" office:value="16" calcext:value-type="float">
            <text:p>16</text:p>
          </table:table-cell>
          <table:table-cell office:value-type="string" calcext:value-type="string">
            <text:p>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text:p>
          </table:table-cell>
          <table:table-cell table:style-name="ce8" office:value-type="string" calcext:value-type="string">
            <text:p>1ドローする</text:p>
          </table:table-cell>
          <table:table-cell table:formula="of:=IFERROR(VLOOKUP([.$V347];[$遺業能力番号.$A$1:$遺業能力番号.$B$9];2;0);0)" office:value-type="float" office:value="4" calcext:value-type="float">
            <text:p>4</text:p>
          </table:table-cell>
          <table:table-cell office:value-type="string" calcext:value-type="string">
            <text:p>https://one-draw.jp/ijinden/cardlist/004/card/04_038.png</text:p>
          </table:table-cell>
          <table:table-cell table:formula="of:=CONCATENATE([$JSON.$A$1];[.$C347];[$JSON.$B$1];[.$E347];[$JSON.$C$1];[.$F347];[$JSON.$D$1];IF(ISNA([.$S347]);&quot;null&quot;;&quot;&quot;&quot;&quot;&amp;[.$S347]&amp;&quot;&quot;&quot;&quot;);[$JSON.$E$1];[.$U347];[$JSON.$F$1];IF(ISNA([.$V347]);&quot;null&quot;;&quot;&quot;&quot;&quot;&amp;[.$V347]&amp;&quot;&quot;&quot;&quot;);[$JSON.$G$1];[.$X347];[$JSON.$H$1];[.$H347];[$JSON.$I$1];[.J347];[$JSON.$J$1];[.$L347];[$JSON.$K$1];[.$O347];[$JSON.$L$1];[.$N347];[$JSON.$M$1];[.$R347];[$JSON.$N$1];[.$T347];[$JSON.$O$1];[.$W347];[$JSON.$P$1];[.$A347];[$JSON.$Q$1];[.$B347];[$JSON.$R$1])" office:value-type="string" office:string-value="{&quot;id&quot;:&quot;4-38&quot;,&quot;name&quot;:&quot;ミシェル・ノストラダムス&quot;,&quot;kana&quot;:&quot;みしぇるのすとらだむす&quot;,&quot;traitText&quot;:&quot;医術&quot;,&quot;ruleText&quot;:&quot;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quot;,&quot;legacyText&quot;:&quot;1ドローする&quot;,&quot;imageUrl&quot;:&quot;https://one-draw.jp/ijinden/cardlist/004/card/04_038.png&quot;,&quot;expansion&quot;:45,&quot;rarity&quot;:1,&quot;type&quot;:1,&quot;level&quot;:5,&quot;color&quot;:16,&quot;term&quot;:0,&quot;trait&quot;:16,&quot;legacy&quot;:4,&quot;orderTable&quot;:347,&quot;orderDeck&quot;:179}," calcext:value-type="string">
            <text:p>{"id":"4-38","name":"ミシェル・ノストラダムス","kana":"みしぇるのすとらだむす","traitText":"医術","ruleText":"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legacyText":"1ドローする","imageUrl":"https://one-draw.jp/ijinden/cardlist/004/card/04_038.png","expansion":45,"rarity":1,"type":1,"level":5,"color":16,"term":0,"trait":16,"legacy":4,"orderTable":347,"orderDeck":179},</text:p>
          </table:table-cell>
          <table:table-cell table:number-columns-repeated="16347"/>
        </table:table-row>
        <table:table-row table:style-name="ro2">
          <table:table-cell office:value-type="float" office:value="348" calcext:value-type="float">
            <text:p>348</text:p>
          </table:table-cell>
          <table:table-cell office:value-type="float" office:value="105" calcext:value-type="float">
            <text:p>105</text:p>
          </table:table-cell>
          <table:table-cell office:value-type="string" calcext:value-type="string">
            <text:p>4-39</text:p>
          </table:table-cell>
          <table:table-cell office:value-type="float" office:value="39" calcext:value-type="float">
            <text:p>39</text:p>
          </table:table-cell>
          <table:table-cell office:value-type="string" calcext:value-type="string">
            <text:p>ヴィルヘルム・コンラート・レントゲン</text:p>
          </table:table-cell>
          <table:table-cell office:value-type="string" calcext:value-type="string">
            <text:p>ゔぃるへるむこんらーとれんとげん</text:p>
          </table:table-cell>
          <table:table-cell office:value-type="string" calcext:value-type="string">
            <text:p>第４弾ブースターパック</text:p>
          </table:table-cell>
          <table:table-cell table:formula="of:=VLOOKUP([.G348];[$収録番号.$A$1:$収録番号.$B$9];2;0)" office:value-type="float" office:value="45" calcext:value-type="float">
            <text:p>45</text:p>
          </table:table-cell>
          <table:table-cell office:value-type="string" calcext:value-type="string">
            <text:p>N</text:p>
          </table:table-cell>
          <table:table-cell table:formula="of:=VLOOKUP([.I348];[$レアリティ番号.$A$1:$レアリティ番号.$B$4];2;0)" office:value-type="float" office:value="1" calcext:value-type="float">
            <text:p>1</text:p>
          </table:table-cell>
          <table:table-cell office:value-type="string" calcext:value-type="string">
            <text:p>イジン</text:p>
          </table:table-cell>
          <table:table-cell table:formula="of:=VLOOKUP([.K348];[$種類番号.$A$1:$種類番号.$B$4];2;0)" office:value-type="float" office:value="1" calcext:value-type="float">
            <text:p>1</text:p>
          </table:table-cell>
          <table:table-cell office:value-type="string" calcext:value-type="string">
            <text:p>紫</text:p>
          </table:table-cell>
          <table:table-cell table:formula="of:=VLOOKUP([.M348];[$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48];[$特性番号.$A$1:$特性番号.$B$8];2;0);0)" office:value-type="float" office:value="0" calcext:value-type="float">
            <text:p>0</text:p>
          </table:table-cell>
          <table:table-cell office:value-type="string" calcext:value-type="string">
            <text:p>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text:p>
          </table:table-cell>
          <table:table-cell table:style-name="ce8" table:formula="of:=NA()" office:value-type="string" office:string-value="" calcext:value-type="error">
            <text:p>#N/A</text:p>
          </table:table-cell>
          <table:table-cell table:formula="of:=IFERROR(VLOOKUP([.$V348];[$遺業能力番号.$A$1:$遺業能力番号.$B$9];2;0);0)" office:value-type="float" office:value="0" calcext:value-type="float">
            <text:p>0</text:p>
          </table:table-cell>
          <table:table-cell office:value-type="string" calcext:value-type="string">
            <text:p>https://one-draw.jp/ijinden/cardlist/004/card/04_039.png</text:p>
          </table:table-cell>
          <table:table-cell table:formula="of:=CONCATENATE([$JSON.$A$1];[.$C348];[$JSON.$B$1];[.$E348];[$JSON.$C$1];[.$F348];[$JSON.$D$1];IF(ISNA([.$S348]);&quot;null&quot;;&quot;&quot;&quot;&quot;&amp;[.$S348]&amp;&quot;&quot;&quot;&quot;);[$JSON.$E$1];[.$U348];[$JSON.$F$1];IF(ISNA([.$V348]);&quot;null&quot;;&quot;&quot;&quot;&quot;&amp;[.$V348]&amp;&quot;&quot;&quot;&quot;);[$JSON.$G$1];[.$X348];[$JSON.$H$1];[.$H348];[$JSON.$I$1];[.J348];[$JSON.$J$1];[.$L348];[$JSON.$K$1];[.$O348];[$JSON.$L$1];[.$N348];[$JSON.$M$1];[.$R348];[$JSON.$N$1];[.$T348];[$JSON.$O$1];[.$W348];[$JSON.$P$1];[.$A348];[$JSON.$Q$1];[.$B348];[$JSON.$R$1])" office:value-type="string" office:string-value="{&quot;id&quot;:&quot;4-39&quot;,&quot;name&quot;:&quot;ヴィルヘルム・コンラート・レントゲン&quot;,&quot;kana&quot;:&quot;ゔぃるへるむこんらーとれんとげん&quot;,&quot;traitText&quot;:null,&quot;ruleText&quot;:&quot;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quot;,&quot;legacyText&quot;:null,&quot;imageUrl&quot;:&quot;https://one-draw.jp/ijinden/cardlist/004/card/04_039.png&quot;,&quot;expansion&quot;:45,&quot;rarity&quot;:1,&quot;type&quot;:1,&quot;level&quot;:3,&quot;color&quot;:16,&quot;term&quot;:0,&quot;trait&quot;:0,&quot;legacy&quot;:0,&quot;orderTable&quot;:348,&quot;orderDeck&quot;:105}," calcext:value-type="string">
            <text:p>{"id":"4-39","name":"ヴィルヘルム・コンラート・レントゲン","kana":"ゔぃるへるむこんらーとれんとげん","traitText":null,"ruleText":"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legacyText":null,"imageUrl":"https://one-draw.jp/ijinden/cardlist/004/card/04_039.png","expansion":45,"rarity":1,"type":1,"level":3,"color":16,"term":0,"trait":0,"legacy":0,"orderTable":348,"orderDeck":105},</text:p>
          </table:table-cell>
          <table:table-cell table:number-columns-repeated="16347"/>
        </table:table-row>
        <table:table-row table:style-name="ro2">
          <table:table-cell office:value-type="float" office:value="349" calcext:value-type="float">
            <text:p>349</text:p>
          </table:table-cell>
          <table:table-cell office:value-type="float" office:value="202" calcext:value-type="float">
            <text:p>202</text:p>
          </table:table-cell>
          <table:table-cell office:value-type="string" calcext:value-type="string">
            <text:p>4-40</text:p>
          </table:table-cell>
          <table:table-cell office:value-type="float" office:value="40" calcext:value-type="float">
            <text:p>40</text:p>
          </table:table-cell>
          <table:table-cell office:value-type="string" calcext:value-type="string">
            <text:p>榎本武揚</text:p>
          </table:table-cell>
          <table:table-cell office:value-type="string" calcext:value-type="string">
            <text:p>えのもとたけあき</text:p>
          </table:table-cell>
          <table:table-cell office:value-type="string" calcext:value-type="string">
            <text:p>第４弾ブースターパック</text:p>
          </table:table-cell>
          <table:table-cell table:formula="of:=VLOOKUP([.G349];[$収録番号.$A$1:$収録番号.$B$9];2;0)" office:value-type="float" office:value="45" calcext:value-type="float">
            <text:p>45</text:p>
          </table:table-cell>
          <table:table-cell office:value-type="string" calcext:value-type="string">
            <text:p>N</text:p>
          </table:table-cell>
          <table:table-cell table:formula="of:=VLOOKUP([.I349];[$レアリティ番号.$A$1:$レアリティ番号.$B$4];2;0)" office:value-type="float" office:value="1" calcext:value-type="float">
            <text:p>1</text:p>
          </table:table-cell>
          <table:table-cell office:value-type="string" calcext:value-type="string">
            <text:p>イジン</text:p>
          </table:table-cell>
          <table:table-cell table:formula="of:=VLOOKUP([.K349];[$種類番号.$A$1:$種類番号.$B$4];2;0)" office:value-type="float" office:value="1" calcext:value-type="float">
            <text:p>1</text:p>
          </table:table-cell>
          <table:table-cell office:value-type="string" calcext:value-type="string">
            <text:p>紫</text:p>
          </table:table-cell>
          <table:table-cell table:formula="of:=VLOOKUP([.M349];[$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Q34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349];[$特性番号.$A$1:$特性番号.$B$8];2;0);0)" office:value-type="float" office:value="0" calcext:value-type="float">
            <text:p>0</text:p>
          </table:table-cell>
          <table:table-cell office:value-type="string" calcext:value-type="string">
            <text:p>航海 - アタッカーになったとき「モータル」を持つイジンが自分の戦場にいるなら、相手の戦場のイジン1体かガーディアン1体を破壊する。そうでなければ、自分の戦場のイジン1体かガーディアン1体を手札に戻す。</text:p>
          </table:table-cell>
          <table:table-cell table:style-name="ce8" table:formula="of:=NA()" office:value-type="string" office:string-value="" calcext:value-type="error">
            <text:p>#N/A</text:p>
          </table:table-cell>
          <table:table-cell table:formula="of:=IFERROR(VLOOKUP([.$V349];[$遺業能力番号.$A$1:$遺業能力番号.$B$9];2;0);0)" office:value-type="float" office:value="0" calcext:value-type="float">
            <text:p>0</text:p>
          </table:table-cell>
          <table:table-cell office:value-type="string" calcext:value-type="string">
            <text:p>https://one-draw.jp/ijinden/cardlist/004/card/04_040.png</text:p>
          </table:table-cell>
          <table:table-cell table:formula="of:=CONCATENATE([$JSON.$A$1];[.$C349];[$JSON.$B$1];[.$E349];[$JSON.$C$1];[.$F349];[$JSON.$D$1];IF(ISNA([.$S349]);&quot;null&quot;;&quot;&quot;&quot;&quot;&amp;[.$S349]&amp;&quot;&quot;&quot;&quot;);[$JSON.$E$1];[.$U349];[$JSON.$F$1];IF(ISNA([.$V349]);&quot;null&quot;;&quot;&quot;&quot;&quot;&amp;[.$V349]&amp;&quot;&quot;&quot;&quot;);[$JSON.$G$1];[.$X349];[$JSON.$H$1];[.$H349];[$JSON.$I$1];[.J349];[$JSON.$J$1];[.$L349];[$JSON.$K$1];[.$O349];[$JSON.$L$1];[.$N349];[$JSON.$M$1];[.$R349];[$JSON.$N$1];[.$T349];[$JSON.$O$1];[.$W349];[$JSON.$P$1];[.$A349];[$JSON.$Q$1];[.$B349];[$JSON.$R$1])" office:value-type="string" office:string-value="{&quot;id&quot;:&quot;4-40&quot;,&quot;name&quot;:&quot;榎本武揚&quot;,&quot;kana&quot;:&quot;えのもとたけあき&quot;,&quot;traitText&quot;:null,&quot;ruleText&quot;:&quot;航海 - アタッカーになったとき「モータル」を持つイジンが自分の戦場にいるなら、相手の戦場のイジン1体かガーディアン1体を破壊する。そうでなければ、自分の戦場のイジン1体かガーディアン1体を手札に戻す。&quot;,&quot;legacyText&quot;:null,&quot;imageUrl&quot;:&quot;https://one-draw.jp/ijinden/cardlist/004/card/04_040.png&quot;,&quot;expansion&quot;:45,&quot;rarity&quot;:1,&quot;type&quot;:1,&quot;level&quot;:6,&quot;color&quot;:16,&quot;term&quot;:1,&quot;trait&quot;:0,&quot;legacy&quot;:0,&quot;orderTable&quot;:349,&quot;orderDeck&quot;:202}," calcext:value-type="string">
            <text:p>{"id":"4-40","name":"榎本武揚","kana":"えのもとたけあき","traitText":null,"ruleText":"航海 - アタッカーになったとき「モータル」を持つイジンが自分の戦場にいるなら、相手の戦場のイジン1体かガーディアン1体を破壊する。そうでなければ、自分の戦場のイジン1体かガーディアン1体を手札に戻す。","legacyText":null,"imageUrl":"https://one-draw.jp/ijinden/cardlist/004/card/04_040.png","expansion":45,"rarity":1,"type":1,"level":6,"color":16,"term":1,"trait":0,"legacy":0,"orderTable":349,"orderDeck":202},</text:p>
          </table:table-cell>
          <table:table-cell table:number-columns-repeated="16347"/>
        </table:table-row>
        <table:table-row table:style-name="ro2">
          <table:table-cell office:value-type="float" office:value="350" calcext:value-type="float">
            <text:p>350</text:p>
          </table:table-cell>
          <table:table-cell office:value-type="float" office:value="250" calcext:value-type="float">
            <text:p>250</text:p>
          </table:table-cell>
          <table:table-cell office:value-type="string" calcext:value-type="string">
            <text:p>4-41</text:p>
          </table:table-cell>
          <table:table-cell office:value-type="float" office:value="41" calcext:value-type="float">
            <text:p>41</text:p>
          </table:table-cell>
          <table:table-cell office:value-type="string" calcext:value-type="string">
            <text:p>無礼打</text:p>
          </table:table-cell>
          <table:table-cell office:value-type="string" calcext:value-type="string">
            <text:p>ぶれいうち</text:p>
          </table:table-cell>
          <table:table-cell office:value-type="string" calcext:value-type="string">
            <text:p>第４弾ブースターパック</text:p>
          </table:table-cell>
          <table:table-cell table:formula="of:=VLOOKUP([.G350];[$収録番号.$A$1:$収録番号.$B$9];2;0)" office:value-type="float" office:value="45" calcext:value-type="float">
            <text:p>45</text:p>
          </table:table-cell>
          <table:table-cell office:value-type="string" calcext:value-type="string">
            <text:p>N</text:p>
          </table:table-cell>
          <table:table-cell table:formula="of:=VLOOKUP([.I350];[$レアリティ番号.$A$1:$レアリティ番号.$B$4];2;0)" office:value-type="float" office:value="1" calcext:value-type="float">
            <text:p>1</text:p>
          </table:table-cell>
          <table:table-cell office:value-type="string" calcext:value-type="string">
            <text:p>ハイケイ</text:p>
          </table:table-cell>
          <table:table-cell table:formula="of:=VLOOKUP([.K350];[$種類番号.$A$1:$種類番号.$B$4];2;0)" office:value-type="float" office:value="2" calcext:value-type="float">
            <text:p>2</text:p>
          </table:table-cell>
          <table:table-cell office:value-type="string" calcext:value-type="string">
            <text:p>赤</text:p>
          </table:table-cell>
          <table:table-cell table:formula="of:=VLOOKUP([.M350];[$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0];[$特性番号.$A$1:$特性番号.$B$8];2;0);0)" office:value-type="float" office:value="0" calcext:value-type="float">
            <text:p>0</text:p>
          </table:table-cell>
          <table:table-cell office:value-type="string" calcext:value-type="string">
            <text:p>レベル2以下の赤でないイジンが戦場に置かれたときに発動できる。そのイジンを破壊して、これを墓地に置く。</text:p>
          </table:table-cell>
          <table:table-cell table:style-name="ce8" office:value-type="string" calcext:value-type="string">
            <text:p>1ドローする</text:p>
          </table:table-cell>
          <table:table-cell table:formula="of:=IFERROR(VLOOKUP([.$V350];[$遺業能力番号.$A$1:$遺業能力番号.$B$9];2;0);0)" office:value-type="float" office:value="4" calcext:value-type="float">
            <text:p>4</text:p>
          </table:table-cell>
          <table:table-cell office:value-type="string" calcext:value-type="string">
            <text:p>https://one-draw.jp/ijinden/cardlist/004/card/04_041.png</text:p>
          </table:table-cell>
          <table:table-cell table:formula="of:=CONCATENATE([$JSON.$A$1];[.$C350];[$JSON.$B$1];[.$E350];[$JSON.$C$1];[.$F350];[$JSON.$D$1];IF(ISNA([.$S350]);&quot;null&quot;;&quot;&quot;&quot;&quot;&amp;[.$S350]&amp;&quot;&quot;&quot;&quot;);[$JSON.$E$1];[.$U350];[$JSON.$F$1];IF(ISNA([.$V350]);&quot;null&quot;;&quot;&quot;&quot;&quot;&amp;[.$V350]&amp;&quot;&quot;&quot;&quot;);[$JSON.$G$1];[.$X350];[$JSON.$H$1];[.$H350];[$JSON.$I$1];[.J350];[$JSON.$J$1];[.$L350];[$JSON.$K$1];[.$O350];[$JSON.$L$1];[.$N350];[$JSON.$M$1];[.$R350];[$JSON.$N$1];[.$T350];[$JSON.$O$1];[.$W350];[$JSON.$P$1];[.$A350];[$JSON.$Q$1];[.$B350];[$JSON.$R$1])" office:value-type="string" office:string-value="{&quot;id&quot;:&quot;4-41&quot;,&quot;name&quot;:&quot;無礼打&quot;,&quot;kana&quot;:&quot;ぶれいうち&quot;,&quot;traitText&quot;:null,&quot;ruleText&quot;:&quot;レベル2以下の赤でないイジンが戦場に置かれたときに発動できる。そのイジンを破壊して、これを墓地に置く。&quot;,&quot;legacyText&quot;:&quot;1ドローする&quot;,&quot;imageUrl&quot;:&quot;https://one-draw.jp/ijinden/cardlist/004/card/04_041.png&quot;,&quot;expansion&quot;:45,&quot;rarity&quot;:1,&quot;type&quot;:2,&quot;level&quot;:3,&quot;color&quot;:1,&quot;term&quot;:0,&quot;trait&quot;:0,&quot;legacy&quot;:4,&quot;orderTable&quot;:350,&quot;orderDeck&quot;:250}," calcext:value-type="string">
            <text:p>{"id":"4-41","name":"無礼打","kana":"ぶれいうち","traitText":null,"ruleText":"レベル2以下の赤でないイジンが戦場に置かれたときに発動できる。そのイジンを破壊して、これを墓地に置く。","legacyText":"1ドローする","imageUrl":"https://one-draw.jp/ijinden/cardlist/004/card/04_041.png","expansion":45,"rarity":1,"type":2,"level":3,"color":1,"term":0,"trait":0,"legacy":4,"orderTable":350,"orderDeck":250},</text:p>
          </table:table-cell>
          <table:table-cell table:number-columns-repeated="16347"/>
        </table:table-row>
        <table:table-row table:style-name="ro2">
          <table:table-cell office:value-type="float" office:value="351" calcext:value-type="float">
            <text:p>351</text:p>
          </table:table-cell>
          <table:table-cell office:value-type="float" office:value="241" calcext:value-type="float">
            <text:p>241</text:p>
          </table:table-cell>
          <table:table-cell office:value-type="string" calcext:value-type="string">
            <text:p>4-42</text:p>
          </table:table-cell>
          <table:table-cell office:value-type="float" office:value="42" calcext:value-type="float">
            <text:p>42</text:p>
          </table:table-cell>
          <table:table-cell office:value-type="string" calcext:value-type="string">
            <text:p>紡績工場</text:p>
          </table:table-cell>
          <table:table-cell office:value-type="string" calcext:value-type="string">
            <text:p>ぼうせきこうじょう</text:p>
          </table:table-cell>
          <table:table-cell office:value-type="string" calcext:value-type="string">
            <text:p>第４弾ブースターパック</text:p>
          </table:table-cell>
          <table:table-cell table:formula="of:=VLOOKUP([.G351];[$収録番号.$A$1:$収録番号.$B$9];2;0)" office:value-type="float" office:value="45" calcext:value-type="float">
            <text:p>45</text:p>
          </table:table-cell>
          <table:table-cell office:value-type="string" calcext:value-type="string">
            <text:p>N</text:p>
          </table:table-cell>
          <table:table-cell table:formula="of:=VLOOKUP([.I351];[$レアリティ番号.$A$1:$レアリティ番号.$B$4];2;0)" office:value-type="float" office:value="1" calcext:value-type="float">
            <text:p>1</text:p>
          </table:table-cell>
          <table:table-cell office:value-type="string" calcext:value-type="string">
            <text:p>ハイケイ</text:p>
          </table:table-cell>
          <table:table-cell table:formula="of:=VLOOKUP([.K351];[$種類番号.$A$1:$種類番号.$B$4];2;0)" office:value-type="float" office:value="2" calcext:value-type="float">
            <text:p>2</text:p>
          </table:table-cell>
          <table:table-cell office:value-type="string" calcext:value-type="string">
            <text:p>赤</text:p>
          </table:table-cell>
          <table:table-cell table:formula="of:=VLOOKUP([.M351];[$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1];[$特性番号.$A$1:$特性番号.$B$8];2;0);0)" office:value-type="float" office:value="0" calcext:value-type="float">
            <text:p>0</text:p>
          </table:table-cell>
          <table:table-cell office:value-type="string" calcext:value-type="string">
            <text:p>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text:p>
          </table:table-cell>
          <table:table-cell table:style-name="ce8" table:formula="of:=NA()" office:value-type="string" office:string-value="" calcext:value-type="error">
            <text:p>#N/A</text:p>
          </table:table-cell>
          <table:table-cell table:formula="of:=IFERROR(VLOOKUP([.$V351];[$遺業能力番号.$A$1:$遺業能力番号.$B$9];2;0);0)" office:value-type="float" office:value="0" calcext:value-type="float">
            <text:p>0</text:p>
          </table:table-cell>
          <table:table-cell office:value-type="string" calcext:value-type="string">
            <text:p>https://one-draw.jp/ijinden/cardlist/004/card/04_042.png</text:p>
          </table:table-cell>
          <table:table-cell table:formula="of:=CONCATENATE([$JSON.$A$1];[.$C351];[$JSON.$B$1];[.$E351];[$JSON.$C$1];[.$F351];[$JSON.$D$1];IF(ISNA([.$S351]);&quot;null&quot;;&quot;&quot;&quot;&quot;&amp;[.$S351]&amp;&quot;&quot;&quot;&quot;);[$JSON.$E$1];[.$U351];[$JSON.$F$1];IF(ISNA([.$V351]);&quot;null&quot;;&quot;&quot;&quot;&quot;&amp;[.$V351]&amp;&quot;&quot;&quot;&quot;);[$JSON.$G$1];[.$X351];[$JSON.$H$1];[.$H351];[$JSON.$I$1];[.J351];[$JSON.$J$1];[.$L351];[$JSON.$K$1];[.$O351];[$JSON.$L$1];[.$N351];[$JSON.$M$1];[.$R351];[$JSON.$N$1];[.$T351];[$JSON.$O$1];[.$W351];[$JSON.$P$1];[.$A351];[$JSON.$Q$1];[.$B351];[$JSON.$R$1])" office:value-type="string" office:string-value="{&quot;id&quot;:&quot;4-42&quot;,&quot;name&quot;:&quot;紡績工場&quot;,&quot;kana&quot;:&quot;ぼうせきこうじょう&quot;,&quot;traitText&quot;:null,&quot;ruleText&quot;:&quot;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quot;,&quot;legacyText&quot;:null,&quot;imageUrl&quot;:&quot;https://one-draw.jp/ijinden/cardlist/004/card/04_042.png&quot;,&quot;expansion&quot;:45,&quot;rarity&quot;:1,&quot;type&quot;:2,&quot;level&quot;:2,&quot;color&quot;:1,&quot;term&quot;:0,&quot;trait&quot;:0,&quot;legacy&quot;:0,&quot;orderTable&quot;:351,&quot;orderDeck&quot;:241}," calcext:value-type="string">
            <text:p>{"id":"4-42","name":"紡績工場","kana":"ぼうせきこうじょう","traitText":null,"ruleText":"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legacyText":null,"imageUrl":"https://one-draw.jp/ijinden/cardlist/004/card/04_042.png","expansion":45,"rarity":1,"type":2,"level":2,"color":1,"term":0,"trait":0,"legacy":0,"orderTable":351,"orderDeck":241},</text:p>
          </table:table-cell>
          <table:table-cell table:number-columns-repeated="16347"/>
        </table:table-row>
        <table:table-row table:style-name="ro2">
          <table:table-cell office:value-type="float" office:value="352" calcext:value-type="float">
            <text:p>352</text:p>
          </table:table-cell>
          <table:table-cell office:value-type="float" office:value="238" calcext:value-type="float">
            <text:p>238</text:p>
          </table:table-cell>
          <table:table-cell office:value-type="string" calcext:value-type="string">
            <text:p>4-43</text:p>
          </table:table-cell>
          <table:table-cell office:value-type="float" office:value="43" calcext:value-type="float">
            <text:p>43</text:p>
          </table:table-cell>
          <table:table-cell office:value-type="string" calcext:value-type="string">
            <text:p>火と氷の大地</text:p>
          </table:table-cell>
          <table:table-cell office:value-type="string" calcext:value-type="string">
            <text:p>ひとこおりのだいち</text:p>
          </table:table-cell>
          <table:table-cell office:value-type="string" calcext:value-type="string">
            <text:p>第４弾ブースターパック</text:p>
          </table:table-cell>
          <table:table-cell table:formula="of:=VLOOKUP([.G352];[$収録番号.$A$1:$収録番号.$B$9];2;0)" office:value-type="float" office:value="45" calcext:value-type="float">
            <text:p>45</text:p>
          </table:table-cell>
          <table:table-cell office:value-type="string" calcext:value-type="string">
            <text:p>N</text:p>
          </table:table-cell>
          <table:table-cell table:formula="of:=VLOOKUP([.I352];[$レアリティ番号.$A$1:$レアリティ番号.$B$4];2;0)" office:value-type="float" office:value="1" calcext:value-type="float">
            <text:p>1</text:p>
          </table:table-cell>
          <table:table-cell office:value-type="string" calcext:value-type="string">
            <text:p>ハイケイ</text:p>
          </table:table-cell>
          <table:table-cell table:formula="of:=VLOOKUP([.K352];[$種類番号.$A$1:$種類番号.$B$4];2;0)" office:value-type="float" office:value="2" calcext:value-type="float">
            <text:p>2</text:p>
          </table:table-cell>
          <table:table-cell office:value-type="string" calcext:value-type="string">
            <text:p>青</text:p>
          </table:table-cell>
          <table:table-cell table:formula="of:=VLOOKUP([.M352];[$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2];[$特性番号.$A$1:$特性番号.$B$8];2;0);0)" office:value-type="float" office:value="0" calcext:value-type="float">
            <text:p>0</text:p>
          </table:table-cell>
          <table:table-cell office:value-type="string" calcext:value-type="string">
            <text:p>これが戦場にある間、自分の戦場の青のイジンは「赤のイジンにブロックされない」を得る。¶これが戦場にある間、相手の戦場のレベル2以下のイジンは「色：赤」を得る。</text:p>
          </table:table-cell>
          <table:table-cell table:style-name="ce8" office:value-type="string" calcext:value-type="string">
            <text:p>手札に戻す</text:p>
          </table:table-cell>
          <table:table-cell table:formula="of:=IFERROR(VLOOKUP([.$V352];[$遺業能力番号.$A$1:$遺業能力番号.$B$9];2;0);0)" office:value-type="float" office:value="5" calcext:value-type="float">
            <text:p>5</text:p>
          </table:table-cell>
          <table:table-cell office:value-type="string" calcext:value-type="string">
            <text:p>https://one-draw.jp/ijinden/cardlist/004/card/04_043.png</text:p>
          </table:table-cell>
          <table:table-cell table:formula="of:=CONCATENATE([$JSON.$A$1];[.$C352];[$JSON.$B$1];[.$E352];[$JSON.$C$1];[.$F352];[$JSON.$D$1];IF(ISNA([.$S352]);&quot;null&quot;;&quot;&quot;&quot;&quot;&amp;[.$S352]&amp;&quot;&quot;&quot;&quot;);[$JSON.$E$1];[.$U352];[$JSON.$F$1];IF(ISNA([.$V352]);&quot;null&quot;;&quot;&quot;&quot;&quot;&amp;[.$V352]&amp;&quot;&quot;&quot;&quot;);[$JSON.$G$1];[.$X352];[$JSON.$H$1];[.$H352];[$JSON.$I$1];[.J352];[$JSON.$J$1];[.$L352];[$JSON.$K$1];[.$O352];[$JSON.$L$1];[.$N352];[$JSON.$M$1];[.$R352];[$JSON.$N$1];[.$T352];[$JSON.$O$1];[.$W352];[$JSON.$P$1];[.$A352];[$JSON.$Q$1];[.$B352];[$JSON.$R$1])" office:value-type="string" office:string-value="{&quot;id&quot;:&quot;4-43&quot;,&quot;name&quot;:&quot;火と氷の大地&quot;,&quot;kana&quot;:&quot;ひとこおりのだいち&quot;,&quot;traitText&quot;:null,&quot;ruleText&quot;:&quot;これが戦場にある間、自分の戦場の青のイジンは「赤のイジンにブロックされない」を得る。¶これが戦場にある間、相手の戦場のレベル2以下のイジンは「色：赤」を得る。&quot;,&quot;legacyText&quot;:&quot;手札に戻す&quot;,&quot;imageUrl&quot;:&quot;https://one-draw.jp/ijinden/cardlist/004/card/04_043.png&quot;,&quot;expansion&quot;:45,&quot;rarity&quot;:1,&quot;type&quot;:2,&quot;level&quot;:1,&quot;color&quot;:2,&quot;term&quot;:0,&quot;trait&quot;:0,&quot;legacy&quot;:5,&quot;orderTable&quot;:352,&quot;orderDeck&quot;:238}," calcext:value-type="string">
            <text:p>{"id":"4-43","name":"火と氷の大地","kana":"ひとこおりのだいち","traitText":null,"ruleText":"これが戦場にある間、自分の戦場の青のイジンは「赤のイジンにブロックされない」を得る。¶これが戦場にある間、相手の戦場のレベル2以下のイジンは「色：赤」を得る。","legacyText":"手札に戻す","imageUrl":"https://one-draw.jp/ijinden/cardlist/004/card/04_043.png","expansion":45,"rarity":1,"type":2,"level":1,"color":2,"term":0,"trait":0,"legacy":5,"orderTable":352,"orderDeck":238},</text:p>
          </table:table-cell>
          <table:table-cell table:number-columns-repeated="16347"/>
        </table:table-row>
        <table:table-row table:style-name="ro2">
          <table:table-cell office:value-type="float" office:value="353" calcext:value-type="float">
            <text:p>353</text:p>
          </table:table-cell>
          <table:table-cell office:value-type="float" office:value="275" calcext:value-type="float">
            <text:p>275</text:p>
          </table:table-cell>
          <table:table-cell office:value-type="string" calcext:value-type="string">
            <text:p>4-44</text:p>
          </table:table-cell>
          <table:table-cell office:value-type="float" office:value="44" calcext:value-type="float">
            <text:p>44</text:p>
          </table:table-cell>
          <table:table-cell office:value-type="string" calcext:value-type="string">
            <text:p>落日の王宮</text:p>
          </table:table-cell>
          <table:table-cell office:value-type="string" calcext:value-type="string">
            <text:p>らくじつのおうきゅう</text:p>
          </table:table-cell>
          <table:table-cell office:value-type="string" calcext:value-type="string">
            <text:p>第４弾ブースターパック</text:p>
          </table:table-cell>
          <table:table-cell table:formula="of:=VLOOKUP([.G353];[$収録番号.$A$1:$収録番号.$B$9];2;0)" office:value-type="float" office:value="45" calcext:value-type="float">
            <text:p>45</text:p>
          </table:table-cell>
          <table:table-cell office:value-type="string" calcext:value-type="string">
            <text:p>N</text:p>
          </table:table-cell>
          <table:table-cell table:formula="of:=VLOOKUP([.I353];[$レアリティ番号.$A$1:$レアリティ番号.$B$4];2;0)" office:value-type="float" office:value="1" calcext:value-type="float">
            <text:p>1</text:p>
          </table:table-cell>
          <table:table-cell office:value-type="string" calcext:value-type="string">
            <text:p>ハイケイ</text:p>
          </table:table-cell>
          <table:table-cell table:formula="of:=VLOOKUP([.K353];[$種類番号.$A$1:$種類番号.$B$4];2;0)" office:value-type="float" office:value="2" calcext:value-type="float">
            <text:p>2</text:p>
          </table:table-cell>
          <table:table-cell office:value-type="string" calcext:value-type="string">
            <text:p>青</text:p>
          </table:table-cell>
          <table:table-cell table:formula="of:=VLOOKUP([.M353];[$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3];[$能力語番号.$A$1:$能力語番号.$B$10];2;0);0)" office:value-type="float" office:value="0" calcext:value-type="float">
            <text:p>0</text:p>
          </table:table-cell>
          <table:table-cell office:value-type="string" calcext:value-type="string">
            <text:p>美術 思想</text:p>
          </table:table-cell>
          <table:table-cell table:formula="of:=IFERROR(VLOOKUP([.$S353];[$特性番号.$A$1:$特性番号.$B$8];2;0);0)" office:value-type="float" office:value="10" calcext:value-type="float">
            <text:p>10</text:p>
          </table:table-cell>
          <table:table-cell office:value-type="string" calcext:value-type="string">
            <text:p>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text:p>
          </table:table-cell>
          <table:table-cell table:style-name="ce8" table:formula="of:=NA()" office:value-type="string" office:string-value="" calcext:value-type="error">
            <text:p>#N/A</text:p>
          </table:table-cell>
          <table:table-cell table:formula="of:=IFERROR(VLOOKUP([.$V353];[$遺業能力番号.$A$1:$遺業能力番号.$B$9];2;0);0)" office:value-type="float" office:value="0" calcext:value-type="float">
            <text:p>0</text:p>
          </table:table-cell>
          <table:table-cell office:value-type="string" calcext:value-type="string">
            <text:p>https://one-draw.jp/ijinden/cardlist/004/card/04_044.png</text:p>
          </table:table-cell>
          <table:table-cell table:formula="of:=CONCATENATE([$JSON.$A$1];[.$C353];[$JSON.$B$1];[.$E353];[$JSON.$C$1];[.$F353];[$JSON.$D$1];IF(ISNA([.$S353]);&quot;null&quot;;&quot;&quot;&quot;&quot;&amp;[.$S353]&amp;&quot;&quot;&quot;&quot;);[$JSON.$E$1];[.$U353];[$JSON.$F$1];IF(ISNA([.$V353]);&quot;null&quot;;&quot;&quot;&quot;&quot;&amp;[.$V353]&amp;&quot;&quot;&quot;&quot;);[$JSON.$G$1];[.$X353];[$JSON.$H$1];[.$H353];[$JSON.$I$1];[.J353];[$JSON.$J$1];[.$L353];[$JSON.$K$1];[.$O353];[$JSON.$L$1];[.$N353];[$JSON.$M$1];[.$R353];[$JSON.$N$1];[.$T353];[$JSON.$O$1];[.$W353];[$JSON.$P$1];[.$A353];[$JSON.$Q$1];[.$B353];[$JSON.$R$1])" office:value-type="string" office:string-value="{&quot;id&quot;:&quot;4-44&quot;,&quot;name&quot;:&quot;落日の王宮&quot;,&quot;kana&quot;:&quot;らくじつのおうきゅう&quot;,&quot;traitText&quot;:&quot;美術 思想&quot;,&quot;ruleText&quot;:&quot;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quot;,&quot;legacyText&quot;:null,&quot;imageUrl&quot;:&quot;https://one-draw.jp/ijinden/cardlist/004/card/04_044.png&quot;,&quot;expansion&quot;:45,&quot;rarity&quot;:1,&quot;type&quot;:2,&quot;level&quot;:6,&quot;color&quot;:2,&quot;term&quot;:0,&quot;trait&quot;:10,&quot;legacy&quot;:0,&quot;orderTable&quot;:353,&quot;orderDeck&quot;:275}," calcext:value-type="string">
            <text:p>{"id":"4-44","name":"落日の王宮","kana":"らくじつのおうきゅう","traitText":"美術 思想","ruleText":"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legacyText":null,"imageUrl":"https://one-draw.jp/ijinden/cardlist/004/card/04_044.png","expansion":45,"rarity":1,"type":2,"level":6,"color":2,"term":0,"trait":10,"legacy":0,"orderTable":353,"orderDeck":275},</text:p>
          </table:table-cell>
          <table:table-cell table:number-columns-repeated="16347"/>
        </table:table-row>
        <table:table-row table:style-name="ro2">
          <table:table-cell office:value-type="float" office:value="354" calcext:value-type="float">
            <text:p>354</text:p>
          </table:table-cell>
          <table:table-cell office:value-type="float" office:value="254" calcext:value-type="float">
            <text:p>254</text:p>
          </table:table-cell>
          <table:table-cell office:value-type="string" calcext:value-type="string">
            <text:p>4-45</text:p>
          </table:table-cell>
          <table:table-cell office:value-type="float" office:value="45" calcext:value-type="float">
            <text:p>45</text:p>
          </table:table-cell>
          <table:table-cell office:value-type="string" calcext:value-type="string">
            <text:p>遣外使節団</text:p>
          </table:table-cell>
          <table:table-cell office:value-type="string" calcext:value-type="string">
            <text:p>けんがいしせつだん</text:p>
          </table:table-cell>
          <table:table-cell office:value-type="string" calcext:value-type="string">
            <text:p>第４弾ブースターパック</text:p>
          </table:table-cell>
          <table:table-cell table:formula="of:=VLOOKUP([.G354];[$収録番号.$A$1:$収録番号.$B$9];2;0)" office:value-type="float" office:value="45" calcext:value-type="float">
            <text:p>45</text:p>
          </table:table-cell>
          <table:table-cell office:value-type="string" calcext:value-type="string">
            <text:p>N</text:p>
          </table:table-cell>
          <table:table-cell table:formula="of:=VLOOKUP([.I354];[$レアリティ番号.$A$1:$レアリティ番号.$B$4];2;0)" office:value-type="float" office:value="1" calcext:value-type="float">
            <text:p>1</text:p>
          </table:table-cell>
          <table:table-cell office:value-type="string" calcext:value-type="string">
            <text:p>ハイケイ</text:p>
          </table:table-cell>
          <table:table-cell table:formula="of:=VLOOKUP([.K354];[$種類番号.$A$1:$種類番号.$B$4];2;0)" office:value-type="float" office:value="2" calcext:value-type="float">
            <text:p>2</text:p>
          </table:table-cell>
          <table:table-cell office:value-type="string" calcext:value-type="string">
            <text:p>緑</text:p>
          </table:table-cell>
          <table:table-cell table:formula="of:=VLOOKUP([.M354];[$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4];[$特性番号.$A$1:$特性番号.$B$8];2;0);0)" office:value-type="float" office:value="0" calcext:value-type="float">
            <text:p>0</text:p>
          </table:table-cell>
          <table:table-cell office:value-type="string" calcext:value-type="string">
            <text:p>自分がイジン召喚する際、そのイジンのレベルは、相手の戦場の色1つにつき1だけ下がる。</text:p>
          </table:table-cell>
          <table:table-cell table:style-name="ce8" table:formula="of:=NA()" office:value-type="string" office:string-value="" calcext:value-type="error">
            <text:p>#N/A</text:p>
          </table:table-cell>
          <table:table-cell table:formula="of:=IFERROR(VLOOKUP([.$V354];[$遺業能力番号.$A$1:$遺業能力番号.$B$9];2;0);0)" office:value-type="float" office:value="0" calcext:value-type="float">
            <text:p>0</text:p>
          </table:table-cell>
          <table:table-cell office:value-type="string" calcext:value-type="string">
            <text:p>https://one-draw.jp/ijinden/cardlist/004/card/04_045.png</text:p>
          </table:table-cell>
          <table:table-cell table:formula="of:=CONCATENATE([$JSON.$A$1];[.$C354];[$JSON.$B$1];[.$E354];[$JSON.$C$1];[.$F354];[$JSON.$D$1];IF(ISNA([.$S354]);&quot;null&quot;;&quot;&quot;&quot;&quot;&amp;[.$S354]&amp;&quot;&quot;&quot;&quot;);[$JSON.$E$1];[.$U354];[$JSON.$F$1];IF(ISNA([.$V354]);&quot;null&quot;;&quot;&quot;&quot;&quot;&amp;[.$V354]&amp;&quot;&quot;&quot;&quot;);[$JSON.$G$1];[.$X354];[$JSON.$H$1];[.$H354];[$JSON.$I$1];[.J354];[$JSON.$J$1];[.$L354];[$JSON.$K$1];[.$O354];[$JSON.$L$1];[.$N354];[$JSON.$M$1];[.$R354];[$JSON.$N$1];[.$T354];[$JSON.$O$1];[.$W354];[$JSON.$P$1];[.$A354];[$JSON.$Q$1];[.$B354];[$JSON.$R$1])" office:value-type="string" office:string-value="{&quot;id&quot;:&quot;4-45&quot;,&quot;name&quot;:&quot;遣外使節団&quot;,&quot;kana&quot;:&quot;けんがいしせつだん&quot;,&quot;traitText&quot;:null,&quot;ruleText&quot;:&quot;自分がイジン召喚する際、そのイジンのレベルは、相手の戦場の色1つにつき1だけ下がる。&quot;,&quot;legacyText&quot;:null,&quot;imageUrl&quot;:&quot;https://one-draw.jp/ijinden/cardlist/004/card/04_045.png&quot;,&quot;expansion&quot;:45,&quot;rarity&quot;:1,&quot;type&quot;:2,&quot;level&quot;:3,&quot;color&quot;:4,&quot;term&quot;:0,&quot;trait&quot;:0,&quot;legacy&quot;:0,&quot;orderTable&quot;:354,&quot;orderDeck&quot;:254}," calcext:value-type="string">
            <text:p>{"id":"4-45","name":"遣外使節団","kana":"けんがいしせつだん","traitText":null,"ruleText":"自分がイジン召喚する際、そのイジンのレベルは、相手の戦場の色1つにつき1だけ下がる。","legacyText":null,"imageUrl":"https://one-draw.jp/ijinden/cardlist/004/card/04_045.png","expansion":45,"rarity":1,"type":2,"level":3,"color":4,"term":0,"trait":0,"legacy":0,"orderTable":354,"orderDeck":254},</text:p>
          </table:table-cell>
          <table:table-cell table:number-columns-repeated="16347"/>
        </table:table-row>
        <table:table-row table:style-name="ro2">
          <table:table-cell office:value-type="float" office:value="355" calcext:value-type="float">
            <text:p>355</text:p>
          </table:table-cell>
          <table:table-cell office:value-type="float" office:value="280" calcext:value-type="float">
            <text:p>280</text:p>
          </table:table-cell>
          <table:table-cell office:value-type="string" calcext:value-type="string">
            <text:p>4-46</text:p>
          </table:table-cell>
          <table:table-cell office:value-type="float" office:value="46" calcext:value-type="float">
            <text:p>46</text:p>
          </table:table-cell>
          <table:table-cell office:value-type="string" calcext:value-type="string">
            <text:p>大日本沿海輿地全図</text:p>
          </table:table-cell>
          <table:table-cell office:value-type="string" calcext:value-type="string">
            <text:p>だいにほんえんかいよちぜんず</text:p>
          </table:table-cell>
          <table:table-cell office:value-type="string" calcext:value-type="string">
            <text:p>第４弾ブースターパック</text:p>
          </table:table-cell>
          <table:table-cell table:formula="of:=VLOOKUP([.G355];[$収録番号.$A$1:$収録番号.$B$9];2;0)" office:value-type="float" office:value="45" calcext:value-type="float">
            <text:p>45</text:p>
          </table:table-cell>
          <table:table-cell office:value-type="string" calcext:value-type="string">
            <text:p>N</text:p>
          </table:table-cell>
          <table:table-cell table:formula="of:=VLOOKUP([.I355];[$レアリティ番号.$A$1:$レアリティ番号.$B$4];2;0)" office:value-type="float" office:value="1" calcext:value-type="float">
            <text:p>1</text:p>
          </table:table-cell>
          <table:table-cell office:value-type="string" calcext:value-type="string">
            <text:p>ハイケイ</text:p>
          </table:table-cell>
          <table:table-cell table:formula="of:=VLOOKUP([.K355];[$種類番号.$A$1:$種類番号.$B$4];2;0)" office:value-type="float" office:value="2" calcext:value-type="float">
            <text:p>2</text:p>
          </table:table-cell>
          <table:table-cell office:value-type="string" calcext:value-type="string">
            <text:p>緑</text:p>
          </table:table-cell>
          <table:table-cell table:formula="of:=VLOOKUP([.M355];[$色番号.$A$1:$色番号.$B$10];2;0)" office:value-type="float" office:value="4" calcext:value-type="float">
            <text:p>4</text:p>
          </table:table-cell>
          <table:table-cell office:value-type="float" office:value="17" calcext:value-type="float">
            <text:p>1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5];[$特性番号.$A$1:$特性番号.$B$8];2;0);0)" office:value-type="float" office:value="0" calcext:value-type="float">
            <text:p>0</text:p>
          </table:table-cell>
          <table:table-cell office:value-type="string" calcext:value-type="string">
            <text:p>これのハイケイ使用に際し、これのレベルは、戦場のハイケイのレベルの合計と同じだけ下がる。¶自分のメインフェイズが開始したとき、ハイケイの名前が戦場に6つ以上あるなら発動する。ゲームに勝利する。</text:p>
          </table:table-cell>
          <table:table-cell table:style-name="ce8" office:value-type="string" calcext:value-type="string">
            <text:p>魔力化</text:p>
          </table:table-cell>
          <table:table-cell table:formula="of:=IFERROR(VLOOKUP([.$V355];[$遺業能力番号.$A$1:$遺業能力番号.$B$9];2;0);0)" office:value-type="float" office:value="1" calcext:value-type="float">
            <text:p>1</text:p>
          </table:table-cell>
          <table:table-cell office:value-type="string" calcext:value-type="string">
            <text:p>https://one-draw.jp/ijinden/cardlist/004/card/04_046.png</text:p>
          </table:table-cell>
          <table:table-cell table:formula="of:=CONCATENATE([$JSON.$A$1];[.$C355];[$JSON.$B$1];[.$E355];[$JSON.$C$1];[.$F355];[$JSON.$D$1];IF(ISNA([.$S355]);&quot;null&quot;;&quot;&quot;&quot;&quot;&amp;[.$S355]&amp;&quot;&quot;&quot;&quot;);[$JSON.$E$1];[.$U355];[$JSON.$F$1];IF(ISNA([.$V355]);&quot;null&quot;;&quot;&quot;&quot;&quot;&amp;[.$V355]&amp;&quot;&quot;&quot;&quot;);[$JSON.$G$1];[.$X355];[$JSON.$H$1];[.$H355];[$JSON.$I$1];[.J355];[$JSON.$J$1];[.$L355];[$JSON.$K$1];[.$O355];[$JSON.$L$1];[.$N355];[$JSON.$M$1];[.$R355];[$JSON.$N$1];[.$T355];[$JSON.$O$1];[.$W355];[$JSON.$P$1];[.$A355];[$JSON.$Q$1];[.$B355];[$JSON.$R$1])" office:value-type="string" office:string-value="{&quot;id&quot;:&quot;4-46&quot;,&quot;name&quot;:&quot;大日本沿海輿地全図&quot;,&quot;kana&quot;:&quot;だいにほんえんかいよちぜんず&quot;,&quot;traitText&quot;:null,&quot;ruleText&quot;:&quot;これのハイケイ使用に際し、これのレベルは、戦場のハイケイのレベルの合計と同じだけ下がる。¶自分のメインフェイズが開始したとき、ハイケイの名前が戦場に6つ以上あるなら発動する。ゲームに勝利する。&quot;,&quot;legacyText&quot;:&quot;魔力化&quot;,&quot;imageUrl&quot;:&quot;https://one-draw.jp/ijinden/cardlist/004/card/04_046.png&quot;,&quot;expansion&quot;:45,&quot;rarity&quot;:1,&quot;type&quot;:2,&quot;level&quot;:17,&quot;color&quot;:4,&quot;term&quot;:0,&quot;trait&quot;:0,&quot;legacy&quot;:1,&quot;orderTable&quot;:355,&quot;orderDeck&quot;:280}," calcext:value-type="string">
            <text:p>{"id":"4-46","name":"大日本沿海輿地全図","kana":"だいにほんえんかいよちぜんず","traitText":null,"ruleText":"これのハイケイ使用に際し、これのレベルは、戦場のハイケイのレベルの合計と同じだけ下がる。¶自分のメインフェイズが開始したとき、ハイケイの名前が戦場に6つ以上あるなら発動する。ゲームに勝利する。","legacyText":"魔力化","imageUrl":"https://one-draw.jp/ijinden/cardlist/004/card/04_046.png","expansion":45,"rarity":1,"type":2,"level":17,"color":4,"term":0,"trait":0,"legacy":1,"orderTable":355,"orderDeck":280},</text:p>
          </table:table-cell>
          <table:table-cell table:number-columns-repeated="16347"/>
        </table:table-row>
        <table:table-row table:style-name="ro2">
          <table:table-cell office:value-type="float" office:value="356" calcext:value-type="float">
            <text:p>356</text:p>
          </table:table-cell>
          <table:table-cell office:value-type="float" office:value="258" calcext:value-type="float">
            <text:p>258</text:p>
          </table:table-cell>
          <table:table-cell office:value-type="string" calcext:value-type="string">
            <text:p>4-47</text:p>
          </table:table-cell>
          <table:table-cell office:value-type="float" office:value="47" calcext:value-type="float">
            <text:p>47</text:p>
          </table:table-cell>
          <table:table-cell office:value-type="string" calcext:value-type="string">
            <text:p>マザーグース</text:p>
          </table:table-cell>
          <table:table-cell office:value-type="string" calcext:value-type="string">
            <text:p>まざーぐーす</text:p>
          </table:table-cell>
          <table:table-cell office:value-type="string" calcext:value-type="string">
            <text:p>第４弾ブースターパック</text:p>
          </table:table-cell>
          <table:table-cell table:formula="of:=VLOOKUP([.G356];[$収録番号.$A$1:$収録番号.$B$9];2;0)" office:value-type="float" office:value="45" calcext:value-type="float">
            <text:p>45</text:p>
          </table:table-cell>
          <table:table-cell office:value-type="string" calcext:value-type="string">
            <text:p>N</text:p>
          </table:table-cell>
          <table:table-cell table:formula="of:=VLOOKUP([.I356];[$レアリティ番号.$A$1:$レアリティ番号.$B$4];2;0)" office:value-type="float" office:value="1" calcext:value-type="float">
            <text:p>1</text:p>
          </table:table-cell>
          <table:table-cell office:value-type="string" calcext:value-type="string">
            <text:p>ハイケイ</text:p>
          </table:table-cell>
          <table:table-cell table:formula="of:=VLOOKUP([.K356];[$種類番号.$A$1:$種類番号.$B$4];2;0)" office:value-type="float" office:value="2" calcext:value-type="float">
            <text:p>2</text:p>
          </table:table-cell>
          <table:table-cell office:value-type="string" calcext:value-type="string">
            <text:p>黄</text:p>
          </table:table-cell>
          <table:table-cell table:formula="of:=VLOOKUP([.M356];[$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Q35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356];[$特性番号.$A$1:$特性番号.$B$8];2;0);0)" office:value-type="float" office:value="0" calcext:value-type="float">
            <text:p>0</text:p>
          </table:table-cell>
          <table:table-cell office:value-type="string" calcext:value-type="string">
            <text:p>執筆 - ハイケイが戦場に置かれたときに発動できる。自分の戦場の黄のカード3つにつき1ドローして、これを破壊する。¶冥装¶装備 : 「特性：音楽」</text:p>
          </table:table-cell>
          <table:table-cell table:style-name="ce8" office:value-type="string" calcext:value-type="string">
            <text:p>喪神</text:p>
          </table:table-cell>
          <table:table-cell table:formula="of:=IFERROR(VLOOKUP([.$V356];[$遺業能力番号.$A$1:$遺業能力番号.$B$9];2;0);0)" office:value-type="float" office:value="9" calcext:value-type="float">
            <text:p>9</text:p>
          </table:table-cell>
          <table:table-cell office:value-type="string" calcext:value-type="string">
            <text:p>https://one-draw.jp/ijinden/cardlist/004/card/04_047.png</text:p>
          </table:table-cell>
          <table:table-cell table:formula="of:=CONCATENATE([$JSON.$A$1];[.$C356];[$JSON.$B$1];[.$E356];[$JSON.$C$1];[.$F356];[$JSON.$D$1];IF(ISNA([.$S356]);&quot;null&quot;;&quot;&quot;&quot;&quot;&amp;[.$S356]&amp;&quot;&quot;&quot;&quot;);[$JSON.$E$1];[.$U356];[$JSON.$F$1];IF(ISNA([.$V356]);&quot;null&quot;;&quot;&quot;&quot;&quot;&amp;[.$V356]&amp;&quot;&quot;&quot;&quot;);[$JSON.$G$1];[.$X356];[$JSON.$H$1];[.$H356];[$JSON.$I$1];[.J356];[$JSON.$J$1];[.$L356];[$JSON.$K$1];[.$O356];[$JSON.$L$1];[.$N356];[$JSON.$M$1];[.$R356];[$JSON.$N$1];[.$T356];[$JSON.$O$1];[.$W356];[$JSON.$P$1];[.$A356];[$JSON.$Q$1];[.$B356];[$JSON.$R$1])" office:value-type="string" office:string-value="{&quot;id&quot;:&quot;4-47&quot;,&quot;name&quot;:&quot;マザーグース&quot;,&quot;kana&quot;:&quot;まざーぐーす&quot;,&quot;traitText&quot;:null,&quot;ruleText&quot;:&quot;執筆 - ハイケイが戦場に置かれたときに発動できる。自分の戦場の黄のカード3つにつき1ドローして、これを破壊する。¶冥装¶装備 : 「特性：音楽」&quot;,&quot;legacyText&quot;:&quot;喪神&quot;,&quot;imageUrl&quot;:&quot;https://one-draw.jp/ijinden/cardlist/004/card/04_047.png&quot;,&quot;expansion&quot;:45,&quot;rarity&quot;:1,&quot;type&quot;:2,&quot;level&quot;:3,&quot;color&quot;:8,&quot;term&quot;:2,&quot;trait&quot;:0,&quot;legacy&quot;:9,&quot;orderTable&quot;:356,&quot;orderDeck&quot;:258}," calcext:value-type="string">
            <text:p>{"id":"4-47","name":"マザーグース","kana":"まざーぐーす","traitText":null,"ruleText":"執筆 - ハイケイが戦場に置かれたときに発動できる。自分の戦場の黄のカード3つにつき1ドローして、これを破壊する。¶冥装¶装備 : 「特性：音楽」","legacyText":"喪神","imageUrl":"https://one-draw.jp/ijinden/cardlist/004/card/04_047.png","expansion":45,"rarity":1,"type":2,"level":3,"color":8,"term":2,"trait":0,"legacy":9,"orderTable":356,"orderDeck":258},</text:p>
          </table:table-cell>
          <table:table-cell table:number-columns-repeated="16347"/>
        </table:table-row>
        <table:table-row table:style-name="ro2">
          <table:table-cell office:value-type="float" office:value="357" calcext:value-type="float">
            <text:p>357</text:p>
          </table:table-cell>
          <table:table-cell office:value-type="float" office:value="265" calcext:value-type="float">
            <text:p>265</text:p>
          </table:table-cell>
          <table:table-cell office:value-type="string" calcext:value-type="string">
            <text:p>4-48</text:p>
          </table:table-cell>
          <table:table-cell office:value-type="float" office:value="48" calcext:value-type="float">
            <text:p>48</text:p>
          </table:table-cell>
          <table:table-cell office:value-type="string" calcext:value-type="string">
            <text:p>遠征軍</text:p>
          </table:table-cell>
          <table:table-cell office:value-type="string" calcext:value-type="string">
            <text:p>えんせいぐん</text:p>
          </table:table-cell>
          <table:table-cell office:value-type="string" calcext:value-type="string">
            <text:p>第４弾ブースターパック</text:p>
          </table:table-cell>
          <table:table-cell table:formula="of:=VLOOKUP([.G357];[$収録番号.$A$1:$収録番号.$B$9];2;0)" office:value-type="float" office:value="45" calcext:value-type="float">
            <text:p>45</text:p>
          </table:table-cell>
          <table:table-cell office:value-type="string" calcext:value-type="string">
            <text:p>N</text:p>
          </table:table-cell>
          <table:table-cell table:formula="of:=VLOOKUP([.I357];[$レアリティ番号.$A$1:$レアリティ番号.$B$4];2;0)" office:value-type="float" office:value="1" calcext:value-type="float">
            <text:p>1</text:p>
          </table:table-cell>
          <table:table-cell office:value-type="string" calcext:value-type="string">
            <text:p>ハイケイ</text:p>
          </table:table-cell>
          <table:table-cell table:formula="of:=VLOOKUP([.K357];[$種類番号.$A$1:$種類番号.$B$4];2;0)" office:value-type="float" office:value="2" calcext:value-type="float">
            <text:p>2</text:p>
          </table:table-cell>
          <table:table-cell office:value-type="string" calcext:value-type="string">
            <text:p>黄</text:p>
          </table:table-cell>
          <table:table-cell table:formula="of:=VLOOKUP([.M357];[$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7];[$特性番号.$A$1:$特性番号.$B$8];2;0);0)" office:value-type="float" office:value="0" calcext:value-type="float">
            <text:p>0</text:p>
          </table:table-cell>
          <table:table-cell office:value-type="string" calcext:value-type="string">
            <text:p>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text:p>
          </table:table-cell>
          <table:table-cell table:style-name="ce8" office:value-type="string" calcext:value-type="string">
            <text:p>山札の上か下に戻す</text:p>
          </table:table-cell>
          <table:table-cell table:formula="of:=IFERROR(VLOOKUP([.$V357];[$遺業能力番号.$A$1:$遺業能力番号.$B$9];2;0);0)" office:value-type="float" office:value="7" calcext:value-type="float">
            <text:p>7</text:p>
          </table:table-cell>
          <table:table-cell office:value-type="string" calcext:value-type="string">
            <text:p>https://one-draw.jp/ijinden/cardlist/004/card/04_048.png</text:p>
          </table:table-cell>
          <table:table-cell table:formula="of:=CONCATENATE([$JSON.$A$1];[.$C357];[$JSON.$B$1];[.$E357];[$JSON.$C$1];[.$F357];[$JSON.$D$1];IF(ISNA([.$S357]);&quot;null&quot;;&quot;&quot;&quot;&quot;&amp;[.$S357]&amp;&quot;&quot;&quot;&quot;);[$JSON.$E$1];[.$U357];[$JSON.$F$1];IF(ISNA([.$V357]);&quot;null&quot;;&quot;&quot;&quot;&quot;&amp;[.$V357]&amp;&quot;&quot;&quot;&quot;);[$JSON.$G$1];[.$X357];[$JSON.$H$1];[.$H357];[$JSON.$I$1];[.J357];[$JSON.$J$1];[.$L357];[$JSON.$K$1];[.$O357];[$JSON.$L$1];[.$N357];[$JSON.$M$1];[.$R357];[$JSON.$N$1];[.$T357];[$JSON.$O$1];[.$W357];[$JSON.$P$1];[.$A357];[$JSON.$Q$1];[.$B357];[$JSON.$R$1])" office:value-type="string" office:string-value="{&quot;id&quot;:&quot;4-48&quot;,&quot;name&quot;:&quot;遠征軍&quot;,&quot;kana&quot;:&quot;えんせいぐん&quot;,&quot;traitText&quot;:null,&quot;ruleText&quot;:&quot;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quot;,&quot;legacyText&quot;:&quot;山札の上か下に戻す&quot;,&quot;imageUrl&quot;:&quot;https://one-draw.jp/ijinden/cardlist/004/card/04_048.png&quot;,&quot;expansion&quot;:45,&quot;rarity&quot;:1,&quot;type&quot;:2,&quot;level&quot;:4,&quot;color&quot;:8,&quot;term&quot;:0,&quot;trait&quot;:0,&quot;legacy&quot;:7,&quot;orderTable&quot;:357,&quot;orderDeck&quot;:265}," calcext:value-type="string">
            <text:p>{"id":"4-48","name":"遠征軍","kana":"えんせいぐん","traitText":null,"ruleText":"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legacyText":"山札の上か下に戻す","imageUrl":"https://one-draw.jp/ijinden/cardlist/004/card/04_048.png","expansion":45,"rarity":1,"type":2,"level":4,"color":8,"term":0,"trait":0,"legacy":7,"orderTable":357,"orderDeck":265},</text:p>
          </table:table-cell>
          <table:table-cell table:number-columns-repeated="16347"/>
        </table:table-row>
        <table:table-row table:style-name="ro2">
          <table:table-cell office:value-type="float" office:value="358" calcext:value-type="float">
            <text:p>358</text:p>
          </table:table-cell>
          <table:table-cell office:value-type="float" office:value="272" calcext:value-type="float">
            <text:p>272</text:p>
          </table:table-cell>
          <table:table-cell office:value-type="string" calcext:value-type="string">
            <text:p>4-49</text:p>
          </table:table-cell>
          <table:table-cell office:value-type="float" office:value="49" calcext:value-type="float">
            <text:p>49</text:p>
          </table:table-cell>
          <table:table-cell office:value-type="string" calcext:value-type="string">
            <text:p>蝦夷共和国</text:p>
          </table:table-cell>
          <table:table-cell office:value-type="string" calcext:value-type="string">
            <text:p>えぞきょうわこく</text:p>
          </table:table-cell>
          <table:table-cell office:value-type="string" calcext:value-type="string">
            <text:p>第４弾ブースターパック</text:p>
          </table:table-cell>
          <table:table-cell table:formula="of:=VLOOKUP([.G358];[$収録番号.$A$1:$収録番号.$B$9];2;0)" office:value-type="float" office:value="45" calcext:value-type="float">
            <text:p>45</text:p>
          </table:table-cell>
          <table:table-cell office:value-type="string" calcext:value-type="string">
            <text:p>N</text:p>
          </table:table-cell>
          <table:table-cell table:formula="of:=VLOOKUP([.I358];[$レアリティ番号.$A$1:$レアリティ番号.$B$4];2;0)" office:value-type="float" office:value="1" calcext:value-type="float">
            <text:p>1</text:p>
          </table:table-cell>
          <table:table-cell office:value-type="string" calcext:value-type="string">
            <text:p>ハイケイ</text:p>
          </table:table-cell>
          <table:table-cell table:formula="of:=VLOOKUP([.K358];[$種類番号.$A$1:$種類番号.$B$4];2;0)" office:value-type="float" office:value="2" calcext:value-type="float">
            <text:p>2</text:p>
          </table:table-cell>
          <table:table-cell office:value-type="string" calcext:value-type="string">
            <text:p>紫</text:p>
          </table:table-cell>
          <table:table-cell table:formula="of:=VLOOKUP([.M358];[$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8];[$特性番号.$A$1:$特性番号.$B$8];2;0);0)" office:value-type="float" office:value="0" calcext:value-type="float">
            <text:p>0</text:p>
          </table:table-cell>
          <table:table-cell office:value-type="string" calcext:value-type="string">
            <text:p>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text:p>
          </table:table-cell>
          <table:table-cell table:style-name="ce8" table:formula="of:=NA()" office:value-type="string" office:string-value="" calcext:value-type="error">
            <text:p>#N/A</text:p>
          </table:table-cell>
          <table:table-cell table:formula="of:=IFERROR(VLOOKUP([.$V358];[$遺業能力番号.$A$1:$遺業能力番号.$B$9];2;0);0)" office:value-type="float" office:value="0" calcext:value-type="float">
            <text:p>0</text:p>
          </table:table-cell>
          <table:table-cell office:value-type="string" calcext:value-type="string">
            <text:p>https://one-draw.jp/ijinden/cardlist/004/card/04_049.png</text:p>
          </table:table-cell>
          <table:table-cell table:formula="of:=CONCATENATE([$JSON.$A$1];[.$C358];[$JSON.$B$1];[.$E358];[$JSON.$C$1];[.$F358];[$JSON.$D$1];IF(ISNA([.$S358]);&quot;null&quot;;&quot;&quot;&quot;&quot;&amp;[.$S358]&amp;&quot;&quot;&quot;&quot;);[$JSON.$E$1];[.$U358];[$JSON.$F$1];IF(ISNA([.$V358]);&quot;null&quot;;&quot;&quot;&quot;&quot;&amp;[.$V358]&amp;&quot;&quot;&quot;&quot;);[$JSON.$G$1];[.$X358];[$JSON.$H$1];[.$H358];[$JSON.$I$1];[.J358];[$JSON.$J$1];[.$L358];[$JSON.$K$1];[.$O358];[$JSON.$L$1];[.$N358];[$JSON.$M$1];[.$R358];[$JSON.$N$1];[.$T358];[$JSON.$O$1];[.$W358];[$JSON.$P$1];[.$A358];[$JSON.$Q$1];[.$B358];[$JSON.$R$1])" office:value-type="string" office:string-value="{&quot;id&quot;:&quot;4-49&quot;,&quot;name&quot;:&quot;蝦夷共和国&quot;,&quot;kana&quot;:&quot;えぞきょうわこく&quot;,&quot;traitText&quot;:null,&quot;ruleText&quot;:&quot;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quot;,&quot;legacyText&quot;:null,&quot;imageUrl&quot;:&quot;https://one-draw.jp/ijinden/cardlist/004/card/04_049.png&quot;,&quot;expansion&quot;:45,&quot;rarity&quot;:1,&quot;type&quot;:2,&quot;level&quot;:5,&quot;color&quot;:16,&quot;term&quot;:0,&quot;trait&quot;:0,&quot;legacy&quot;:0,&quot;orderTable&quot;:358,&quot;orderDeck&quot;:272}," calcext:value-type="string">
            <text:p>{"id":"4-49","name":"蝦夷共和国","kana":"えぞきょうわこく","traitText":null,"ruleText":"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legacyText":null,"imageUrl":"https://one-draw.jp/ijinden/cardlist/004/card/04_049.png","expansion":45,"rarity":1,"type":2,"level":5,"color":16,"term":0,"trait":0,"legacy":0,"orderTable":358,"orderDeck":272},</text:p>
          </table:table-cell>
          <table:table-cell table:number-columns-repeated="16347"/>
        </table:table-row>
        <table:table-row table:style-name="ro2">
          <table:table-cell office:value-type="float" office:value="359" calcext:value-type="float">
            <text:p>359</text:p>
          </table:table-cell>
          <table:table-cell office:value-type="float" office:value="273" calcext:value-type="float">
            <text:p>273</text:p>
          </table:table-cell>
          <table:table-cell office:value-type="string" calcext:value-type="string">
            <text:p>4-50</text:p>
          </table:table-cell>
          <table:table-cell office:value-type="float" office:value="50" calcext:value-type="float">
            <text:p>50</text:p>
          </table:table-cell>
          <table:table-cell office:value-type="string" calcext:value-type="string">
            <text:p>喀血の流行り病</text:p>
          </table:table-cell>
          <table:table-cell office:value-type="string" calcext:value-type="string">
            <text:p>かっけつのはやりやまい</text:p>
          </table:table-cell>
          <table:table-cell office:value-type="string" calcext:value-type="string">
            <text:p>第４弾ブースターパック</text:p>
          </table:table-cell>
          <table:table-cell table:formula="of:=VLOOKUP([.G359];[$収録番号.$A$1:$収録番号.$B$9];2;0)" office:value-type="float" office:value="45" calcext:value-type="float">
            <text:p>45</text:p>
          </table:table-cell>
          <table:table-cell office:value-type="string" calcext:value-type="string">
            <text:p>N</text:p>
          </table:table-cell>
          <table:table-cell table:formula="of:=VLOOKUP([.I359];[$レアリティ番号.$A$1:$レアリティ番号.$B$4];2;0)" office:value-type="float" office:value="1" calcext:value-type="float">
            <text:p>1</text:p>
          </table:table-cell>
          <table:table-cell office:value-type="string" calcext:value-type="string">
            <text:p>ハイケイ</text:p>
          </table:table-cell>
          <table:table-cell table:formula="of:=VLOOKUP([.K359];[$種類番号.$A$1:$種類番号.$B$4];2;0)" office:value-type="float" office:value="2" calcext:value-type="float">
            <text:p>2</text:p>
          </table:table-cell>
          <table:table-cell office:value-type="string" calcext:value-type="string">
            <text:p>紫</text:p>
          </table:table-cell>
          <table:table-cell table:formula="of:=VLOOKUP([.M359];[$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9];[$特性番号.$A$1:$特性番号.$B$8];2;0);0)" office:value-type="float" office:value="0" calcext:value-type="float">
            <text:p>0</text:p>
          </table:table-cell>
          <table:table-cell office:value-type="string" calcext:value-type="string">
            <text:p>メインフェイズが開始したとき、ターンプレイヤーの戦場にイジンがいないなら、これを破壊する。そうでなければ、ターンプレイヤーの戦場のイジン1体を破壊する。そのイジンはターンプレイヤーが選ぶ。</text:p>
          </table:table-cell>
          <table:table-cell table:style-name="ce8" table:formula="of:=NA()" office:value-type="string" office:string-value="" calcext:value-type="error">
            <text:p>#N/A</text:p>
          </table:table-cell>
          <table:table-cell table:formula="of:=IFERROR(VLOOKUP([.$V359];[$遺業能力番号.$A$1:$遺業能力番号.$B$9];2;0);0)" office:value-type="float" office:value="0" calcext:value-type="float">
            <text:p>0</text:p>
          </table:table-cell>
          <table:table-cell office:value-type="string" calcext:value-type="string">
            <text:p>https://one-draw.jp/ijinden/cardlist/004/card/04_050.png</text:p>
          </table:table-cell>
          <table:table-cell table:formula="of:=CONCATENATE([$JSON.$A$1];[.$C359];[$JSON.$B$1];[.$E359];[$JSON.$C$1];[.$F359];[$JSON.$D$1];IF(ISNA([.$S359]);&quot;null&quot;;&quot;&quot;&quot;&quot;&amp;[.$S359]&amp;&quot;&quot;&quot;&quot;);[$JSON.$E$1];[.$U359];[$JSON.$F$1];IF(ISNA([.$V359]);&quot;null&quot;;&quot;&quot;&quot;&quot;&amp;[.$V359]&amp;&quot;&quot;&quot;&quot;);[$JSON.$G$1];[.$X359];[$JSON.$H$1];[.$H359];[$JSON.$I$1];[.J359];[$JSON.$J$1];[.$L359];[$JSON.$K$1];[.$O359];[$JSON.$L$1];[.$N359];[$JSON.$M$1];[.$R359];[$JSON.$N$1];[.$T359];[$JSON.$O$1];[.$W359];[$JSON.$P$1];[.$A359];[$JSON.$Q$1];[.$B359];[$JSON.$R$1])" office:value-type="string" office:string-value="{&quot;id&quot;:&quot;4-50&quot;,&quot;name&quot;:&quot;喀血の流行り病&quot;,&quot;kana&quot;:&quot;かっけつのはやりやまい&quot;,&quot;traitText&quot;:null,&quot;ruleText&quot;:&quot;メインフェイズが開始したとき、ターンプレイヤーの戦場にイジンがいないなら、これを破壊する。そうでなければ、ターンプレイヤーの戦場のイジン1体を破壊する。そのイジンはターンプレイヤーが選ぶ。&quot;,&quot;legacyText&quot;:null,&quot;imageUrl&quot;:&quot;https://one-draw.jp/ijinden/cardlist/004/card/04_050.png&quot;,&quot;expansion&quot;:45,&quot;rarity&quot;:1,&quot;type&quot;:2,&quot;level&quot;:5,&quot;color&quot;:16,&quot;term&quot;:0,&quot;trait&quot;:0,&quot;legacy&quot;:0,&quot;orderTable&quot;:359,&quot;orderDeck&quot;:273}," calcext:value-type="string">
            <text:p>{"id":"4-50","name":"喀血の流行り病","kana":"かっけつのはやりやまい","traitText":null,"ruleText":"メインフェイズが開始したとき、ターンプレイヤーの戦場にイジンがいないなら、これを破壊する。そうでなければ、ターンプレイヤーの戦場のイジン1体を破壊する。そのイジンはターンプレイヤーが選ぶ。","legacyText":null,"imageUrl":"https://one-draw.jp/ijinden/cardlist/004/card/04_050.png","expansion":45,"rarity":1,"type":2,"level":5,"color":16,"term":0,"trait":0,"legacy":0,"orderTable":359,"orderDeck":273},</text:p>
          </table:table-cell>
          <table:table-cell table:number-columns-repeated="16347"/>
        </table:table-row>
        <table:table-row table:style-name="ro2">
          <table:table-cell office:value-type="float" office:value="360" calcext:value-type="float">
            <text:p>360</text:p>
          </table:table-cell>
          <table:table-cell office:value-type="float" office:value="282" calcext:value-type="float">
            <text:p>282</text:p>
          </table:table-cell>
          <table:table-cell office:value-type="string" calcext:value-type="string">
            <text:p>4-51</text:p>
          </table:table-cell>
          <table:table-cell office:value-type="float" office:value="51" calcext:value-type="float">
            <text:p>51</text:p>
          </table:table-cell>
          <table:table-cell office:value-type="string" calcext:value-type="string">
            <text:p>カーバナイズ</text:p>
          </table:table-cell>
          <table:table-cell office:value-type="string" calcext:value-type="string">
            <text:p>かーばないず</text:p>
          </table:table-cell>
          <table:table-cell office:value-type="string" calcext:value-type="string">
            <text:p>第４弾ブースターパック</text:p>
          </table:table-cell>
          <table:table-cell table:formula="of:=VLOOKUP([.G360];[$収録番号.$A$1:$収録番号.$B$9];2;0)" office:value-type="float" office:value="45" calcext:value-type="float">
            <text:p>45</text:p>
          </table:table-cell>
          <table:table-cell office:value-type="string" calcext:value-type="string">
            <text:p>N</text:p>
          </table:table-cell>
          <table:table-cell table:formula="of:=VLOOKUP([.I360];[$レアリティ番号.$A$1:$レアリティ番号.$B$4];2;0)" office:value-type="float" office:value="1" calcext:value-type="float">
            <text:p>1</text:p>
          </table:table-cell>
          <table:table-cell office:value-type="string" calcext:value-type="string">
            <text:p>マホウ</text:p>
          </table:table-cell>
          <table:table-cell table:formula="of:=VLOOKUP([.K360];[$種類番号.$A$1:$種類番号.$B$4];2;0)" office:value-type="float" office:value="3" calcext:value-type="float">
            <text:p>3</text:p>
          </table:table-cell>
          <table:table-cell office:value-type="string" calcext:value-type="string">
            <text:p>赤</text:p>
          </table:table-cell>
          <table:table-cell table:formula="of:=VLOOKUP([.M360];[$色番号.$A$1:$色番号.$B$10];2;0)" office:value-type="float" office:value="1" calcext:value-type="float">
            <text:p>1</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Q36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0];[$特性番号.$A$1:$特性番号.$B$8];2;0);0)" office:value-type="float" office:value="0" calcext:value-type="float">
            <text:p>0</text:p>
          </table:table-cell>
          <table:table-cell office:value-type="string" calcext:value-type="string">
            <text:p>戦場のハイケイ1つか、戦場の装備されているカード1つを指定して発動できる。そのカードを破壊する。この能力によって破壊されたカードは、墓地に置かれる代わりに山札の下に戻される。</text:p>
          </table:table-cell>
          <table:table-cell table:style-name="ce8" office:value-type="string" calcext:value-type="string">
            <text:p>冥府発動</text:p>
          </table:table-cell>
          <table:table-cell table:formula="of:=IFERROR(VLOOKUP([.$V360];[$遺業能力番号.$A$1:$遺業能力番号.$B$9];2;0);0)" office:value-type="float" office:value="2" calcext:value-type="float">
            <text:p>2</text:p>
          </table:table-cell>
          <table:table-cell office:value-type="string" calcext:value-type="string">
            <text:p>https://one-draw.jp/ijinden/cardlist/004/card/04_051.png</text:p>
          </table:table-cell>
          <table:table-cell table:formula="of:=CONCATENATE([$JSON.$A$1];[.$C360];[$JSON.$B$1];[.$E360];[$JSON.$C$1];[.$F360];[$JSON.$D$1];IF(ISNA([.$S360]);&quot;null&quot;;&quot;&quot;&quot;&quot;&amp;[.$S360]&amp;&quot;&quot;&quot;&quot;);[$JSON.$E$1];[.$U360];[$JSON.$F$1];IF(ISNA([.$V360]);&quot;null&quot;;&quot;&quot;&quot;&quot;&amp;[.$V360]&amp;&quot;&quot;&quot;&quot;);[$JSON.$G$1];[.$X360];[$JSON.$H$1];[.$H360];[$JSON.$I$1];[.J360];[$JSON.$J$1];[.$L360];[$JSON.$K$1];[.$O360];[$JSON.$L$1];[.$N360];[$JSON.$M$1];[.$R360];[$JSON.$N$1];[.$T360];[$JSON.$O$1];[.$W360];[$JSON.$P$1];[.$A360];[$JSON.$Q$1];[.$B360];[$JSON.$R$1])" office:value-type="string" office:string-value="{&quot;id&quot;:&quot;4-51&quot;,&quot;name&quot;:&quot;カーバナイズ&quot;,&quot;kana&quot;:&quot;かーばないず&quot;,&quot;traitText&quot;:null,&quot;ruleText&quot;:&quot;戦場のハイケイ1つか、戦場の装備されているカード1つを指定して発動できる。そのカードを破壊する。この能力によって破壊されたカードは、墓地に置かれる代わりに山札の下に戻される。&quot;,&quot;legacyText&quot;:&quot;冥府発動&quot;,&quot;imageUrl&quot;:&quot;https://one-draw.jp/ijinden/cardlist/004/card/04_051.png&quot;,&quot;expansion&quot;:45,&quot;rarity&quot;:1,&quot;type&quot;:3,&quot;level&quot;:1,&quot;color&quot;:1,&quot;term&quot;:0,&quot;trait&quot;:0,&quot;legacy&quot;:2,&quot;orderTable&quot;:360,&quot;orderDeck&quot;:282}," calcext:value-type="string">
            <text:p>{"id":"4-51","name":"カーバナイズ","kana":"かーばないず","traitText":null,"ruleText":"戦場のハイケイ1つか、戦場の装備されているカード1つを指定して発動できる。そのカードを破壊する。この能力によって破壊されたカードは、墓地に置かれる代わりに山札の下に戻される。","legacyText":"冥府発動","imageUrl":"https://one-draw.jp/ijinden/cardlist/004/card/04_051.png","expansion":45,"rarity":1,"type":3,"level":1,"color":1,"term":0,"trait":0,"legacy":2,"orderTable":360,"orderDeck":282},</text:p>
          </table:table-cell>
          <table:table-cell table:number-columns-repeated="16347"/>
        </table:table-row>
        <table:table-row table:style-name="ro2">
          <table:table-cell office:value-type="float" office:value="361" calcext:value-type="float">
            <text:p>361</text:p>
          </table:table-cell>
          <table:table-cell office:value-type="float" office:value="325" calcext:value-type="float">
            <text:p>325</text:p>
          </table:table-cell>
          <table:table-cell office:value-type="string" calcext:value-type="string">
            <text:p>4-52</text:p>
          </table:table-cell>
          <table:table-cell office:value-type="float" office:value="52" calcext:value-type="float">
            <text:p>52</text:p>
          </table:table-cell>
          <table:table-cell office:value-type="string" calcext:value-type="string">
            <text:p>ソーラーフレア</text:p>
          </table:table-cell>
          <table:table-cell office:value-type="string" calcext:value-type="string">
            <text:p>そーらーふれあ</text:p>
          </table:table-cell>
          <table:table-cell office:value-type="string" calcext:value-type="string">
            <text:p>第４弾ブースターパック</text:p>
          </table:table-cell>
          <table:table-cell table:formula="of:=VLOOKUP([.G361];[$収録番号.$A$1:$収録番号.$B$9];2;0)" office:value-type="float" office:value="45" calcext:value-type="float">
            <text:p>45</text:p>
          </table:table-cell>
          <table:table-cell office:value-type="string" calcext:value-type="string">
            <text:p>N</text:p>
          </table:table-cell>
          <table:table-cell table:formula="of:=VLOOKUP([.I361];[$レアリティ番号.$A$1:$レアリティ番号.$B$4];2;0)" office:value-type="float" office:value="1" calcext:value-type="float">
            <text:p>1</text:p>
          </table:table-cell>
          <table:table-cell office:value-type="string" calcext:value-type="string">
            <text:p>マホウ</text:p>
          </table:table-cell>
          <table:table-cell table:formula="of:=VLOOKUP([.K361];[$種類番号.$A$1:$種類番号.$B$4];2;0)" office:value-type="float" office:value="3" calcext:value-type="float">
            <text:p>3</text:p>
          </table:table-cell>
          <table:table-cell office:value-type="string" calcext:value-type="string">
            <text:p>赤</text:p>
          </table:table-cell>
          <table:table-cell table:formula="of:=VLOOKUP([.M361];[$色番号.$A$1:$色番号.$B$10];2;0)"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36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1];[$特性番号.$A$1:$特性番号.$B$8];2;0);0)" office:value-type="float" office:value="0" calcext:value-type="float">
            <text:p>0</text:p>
          </table:table-cell>
          <table:table-cell office:value-type="string" calcext:value-type="string">
            <text:p>以下から1つを発動する。¶・相手は、このターンに限り「自分の魔力ゾーンの能力は発動しない」を得る。¶・自分の手札の他のカード1つを墓地に置いて、1ドローする。</text:p>
          </table:table-cell>
          <table:table-cell table:style-name="ce8" office:value-type="string" calcext:value-type="string">
            <text:p>冥府発動</text:p>
          </table:table-cell>
          <table:table-cell table:formula="of:=IFERROR(VLOOKUP([.$V361];[$遺業能力番号.$A$1:$遺業能力番号.$B$9];2;0);0)" office:value-type="float" office:value="2" calcext:value-type="float">
            <text:p>2</text:p>
          </table:table-cell>
          <table:table-cell office:value-type="string" calcext:value-type="string">
            <text:p>https://one-draw.jp/ijinden/cardlist/004/card/04_052.png</text:p>
          </table:table-cell>
          <table:table-cell table:formula="of:=CONCATENATE([$JSON.$A$1];[.$C361];[$JSON.$B$1];[.$E361];[$JSON.$C$1];[.$F361];[$JSON.$D$1];IF(ISNA([.$S361]);&quot;null&quot;;&quot;&quot;&quot;&quot;&amp;[.$S361]&amp;&quot;&quot;&quot;&quot;);[$JSON.$E$1];[.$U361];[$JSON.$F$1];IF(ISNA([.$V361]);&quot;null&quot;;&quot;&quot;&quot;&quot;&amp;[.$V361]&amp;&quot;&quot;&quot;&quot;);[$JSON.$G$1];[.$X361];[$JSON.$H$1];[.$H361];[$JSON.$I$1];[.J361];[$JSON.$J$1];[.$L361];[$JSON.$K$1];[.$O361];[$JSON.$L$1];[.$N361];[$JSON.$M$1];[.$R361];[$JSON.$N$1];[.$T361];[$JSON.$O$1];[.$W361];[$JSON.$P$1];[.$A361];[$JSON.$Q$1];[.$B361];[$JSON.$R$1])" office:value-type="string" office:string-value="{&quot;id&quot;:&quot;4-52&quot;,&quot;name&quot;:&quot;ソーラーフレア&quot;,&quot;kana&quot;:&quot;そーらーふれあ&quot;,&quot;traitText&quot;:null,&quot;ruleText&quot;:&quot;以下から1つを発動する。¶・相手は、このターンに限り「自分の魔力ゾーンの能力は発動しない」を得る。¶・自分の手札の他のカード1つを墓地に置いて、1ドローする。&quot;,&quot;legacyText&quot;:&quot;冥府発動&quot;,&quot;imageUrl&quot;:&quot;https://one-draw.jp/ijinden/cardlist/004/card/04_052.png&quot;,&quot;expansion&quot;:45,&quot;rarity&quot;:1,&quot;type&quot;:3,&quot;level&quot;:5,&quot;color&quot;:1,&quot;term&quot;:0,&quot;trait&quot;:0,&quot;legacy&quot;:2,&quot;orderTable&quot;:361,&quot;orderDeck&quot;:325}," calcext:value-type="string">
            <text:p>{"id":"4-52","name":"ソーラーフレア","kana":"そーらーふれあ","traitText":null,"ruleText":"以下から1つを発動する。¶・相手は、このターンに限り「自分の魔力ゾーンの能力は発動しない」を得る。¶・自分の手札の他のカード1つを墓地に置いて、1ドローする。","legacyText":"冥府発動","imageUrl":"https://one-draw.jp/ijinden/cardlist/004/card/04_052.png","expansion":45,"rarity":1,"type":3,"level":5,"color":1,"term":0,"trait":0,"legacy":2,"orderTable":361,"orderDeck":325},</text:p>
          </table:table-cell>
          <table:table-cell table:number-columns-repeated="16347"/>
        </table:table-row>
        <table:table-row table:style-name="ro2">
          <table:table-cell office:value-type="float" office:value="362" calcext:value-type="float">
            <text:p>362</text:p>
          </table:table-cell>
          <table:table-cell office:value-type="float" office:value="281" calcext:value-type="float">
            <text:p>281</text:p>
          </table:table-cell>
          <table:table-cell office:value-type="string" calcext:value-type="string">
            <text:p>4-53</text:p>
          </table:table-cell>
          <table:table-cell office:value-type="float" office:value="53" calcext:value-type="float">
            <text:p>53</text:p>
          </table:table-cell>
          <table:table-cell office:value-type="string" calcext:value-type="string">
            <text:p>フール</text:p>
          </table:table-cell>
          <table:table-cell office:value-type="string" calcext:value-type="string">
            <text:p>ふーる</text:p>
          </table:table-cell>
          <table:table-cell office:value-type="string" calcext:value-type="string">
            <text:p>第４弾ブースターパック</text:p>
          </table:table-cell>
          <table:table-cell table:formula="of:=VLOOKUP([.G362];[$収録番号.$A$1:$収録番号.$B$9];2;0)" office:value-type="float" office:value="45" calcext:value-type="float">
            <text:p>45</text:p>
          </table:table-cell>
          <table:table-cell office:value-type="string" calcext:value-type="string">
            <text:p>N</text:p>
          </table:table-cell>
          <table:table-cell table:formula="of:=VLOOKUP([.I362];[$レアリティ番号.$A$1:$レアリティ番号.$B$4];2;0)" office:value-type="float" office:value="1" calcext:value-type="float">
            <text:p>1</text:p>
          </table:table-cell>
          <table:table-cell office:value-type="string" calcext:value-type="string">
            <text:p>マホウ</text:p>
          </table:table-cell>
          <table:table-cell table:formula="of:=VLOOKUP([.K362];[$種類番号.$A$1:$種類番号.$B$4];2;0)" office:value-type="float" office:value="3" calcext:value-type="float">
            <text:p>3</text:p>
          </table:table-cell>
          <table:table-cell office:value-type="string" calcext:value-type="string">
            <text:p>青</text:p>
          </table:table-cell>
          <table:table-cell table:formula="of:=VLOOKUP([.M362];[$色番号.$A$1:$色番号.$B$10];2;0)" office:value-type="float" office:value="2" calcext:value-type="float">
            <text:p>2</text:p>
          </table:table-cell>
          <table:table-cell table:number-columns-repeated="2" office:value-type="float" office:value="0" calcext:value-type="float">
            <text:p>0</text:p>
          </table:table-cell>
          <table:table-cell table:formula="of:=NA()" office:value-type="string" office:string-value="" calcext:value-type="error">
            <text:p>#N/A</text:p>
          </table:table-cell>
          <table:table-cell table:formula="of:=IFERROR(VLOOKUP([.$Q36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2];[$特性番号.$A$1:$特性番号.$B$8];2;0);0)" office:value-type="float" office:value="0" calcext:value-type="float">
            <text:p>0</text:p>
          </table:table-cell>
          <table:table-cell office:value-type="string" calcext:value-type="string">
            <text:p>自分の墓地のマホウのレベルの合計が1以上なら、自分の手札の他のカード1つを墓地に置く。そうでなければ、1ドローする。</text:p>
          </table:table-cell>
          <table:table-cell table:style-name="ce8" office:value-type="string" calcext:value-type="string">
            <text:p>1ドローする</text:p>
          </table:table-cell>
          <table:table-cell table:formula="of:=IFERROR(VLOOKUP([.$V362];[$遺業能力番号.$A$1:$遺業能力番号.$B$9];2;0);0)" office:value-type="float" office:value="4" calcext:value-type="float">
            <text:p>4</text:p>
          </table:table-cell>
          <table:table-cell office:value-type="string" calcext:value-type="string">
            <text:p>https://one-draw.jp/ijinden/cardlist/004/card/04_053.png</text:p>
          </table:table-cell>
          <table:table-cell table:formula="of:=CONCATENATE([$JSON.$A$1];[.$C362];[$JSON.$B$1];[.$E362];[$JSON.$C$1];[.$F362];[$JSON.$D$1];IF(ISNA([.$S362]);&quot;null&quot;;&quot;&quot;&quot;&quot;&amp;[.$S362]&amp;&quot;&quot;&quot;&quot;);[$JSON.$E$1];[.$U362];[$JSON.$F$1];IF(ISNA([.$V362]);&quot;null&quot;;&quot;&quot;&quot;&quot;&amp;[.$V362]&amp;&quot;&quot;&quot;&quot;);[$JSON.$G$1];[.$X362];[$JSON.$H$1];[.$H362];[$JSON.$I$1];[.J362];[$JSON.$J$1];[.$L362];[$JSON.$K$1];[.$O362];[$JSON.$L$1];[.$N362];[$JSON.$M$1];[.$R362];[$JSON.$N$1];[.$T362];[$JSON.$O$1];[.$W362];[$JSON.$P$1];[.$A362];[$JSON.$Q$1];[.$B362];[$JSON.$R$1])" office:value-type="string" office:string-value="{&quot;id&quot;:&quot;4-53&quot;,&quot;name&quot;:&quot;フール&quot;,&quot;kana&quot;:&quot;ふーる&quot;,&quot;traitText&quot;:null,&quot;ruleText&quot;:&quot;自分の墓地のマホウのレベルの合計が1以上なら、自分の手札の他のカード1つを墓地に置く。そうでなければ、1ドローする。&quot;,&quot;legacyText&quot;:&quot;1ドローする&quot;,&quot;imageUrl&quot;:&quot;https://one-draw.jp/ijinden/cardlist/004/card/04_053.png&quot;,&quot;expansion&quot;:45,&quot;rarity&quot;:1,&quot;type&quot;:3,&quot;level&quot;:0,&quot;color&quot;:2,&quot;term&quot;:0,&quot;trait&quot;:0,&quot;legacy&quot;:4,&quot;orderTable&quot;:362,&quot;orderDeck&quot;:281}," calcext:value-type="string">
            <text:p>{"id":"4-53","name":"フール","kana":"ふーる","traitText":null,"ruleText":"自分の墓地のマホウのレベルの合計が1以上なら、自分の手札の他のカード1つを墓地に置く。そうでなければ、1ドローする。","legacyText":"1ドローする","imageUrl":"https://one-draw.jp/ijinden/cardlist/004/card/04_053.png","expansion":45,"rarity":1,"type":3,"level":0,"color":2,"term":0,"trait":0,"legacy":4,"orderTable":362,"orderDeck":281},</text:p>
          </table:table-cell>
          <table:table-cell table:number-columns-repeated="16347"/>
        </table:table-row>
        <table:table-row table:style-name="ro2">
          <table:table-cell office:value-type="float" office:value="363" calcext:value-type="float">
            <text:p>363</text:p>
          </table:table-cell>
          <table:table-cell office:value-type="float" office:value="283" calcext:value-type="float">
            <text:p>283</text:p>
          </table:table-cell>
          <table:table-cell office:value-type="string" calcext:value-type="string">
            <text:p>4-54</text:p>
          </table:table-cell>
          <table:table-cell office:value-type="float" office:value="54" calcext:value-type="float">
            <text:p>54</text:p>
          </table:table-cell>
          <table:table-cell office:value-type="string" calcext:value-type="string">
            <text:p>ドロレス</text:p>
          </table:table-cell>
          <table:table-cell office:value-type="string" calcext:value-type="string">
            <text:p>どろれす</text:p>
          </table:table-cell>
          <table:table-cell office:value-type="string" calcext:value-type="string">
            <text:p>第４弾ブースターパック</text:p>
          </table:table-cell>
          <table:table-cell table:formula="of:=VLOOKUP([.G363];[$収録番号.$A$1:$収録番号.$B$9];2;0)" office:value-type="float" office:value="45" calcext:value-type="float">
            <text:p>45</text:p>
          </table:table-cell>
          <table:table-cell office:value-type="string" calcext:value-type="string">
            <text:p>N</text:p>
          </table:table-cell>
          <table:table-cell table:formula="of:=VLOOKUP([.I363];[$レアリティ番号.$A$1:$レアリティ番号.$B$4];2;0)" office:value-type="float" office:value="1" calcext:value-type="float">
            <text:p>1</text:p>
          </table:table-cell>
          <table:table-cell office:value-type="string" calcext:value-type="string">
            <text:p>マホウ</text:p>
          </table:table-cell>
          <table:table-cell table:formula="of:=VLOOKUP([.K363];[$種類番号.$A$1:$種類番号.$B$4];2;0)" office:value-type="float" office:value="3" calcext:value-type="float">
            <text:p>3</text:p>
          </table:table-cell>
          <table:table-cell office:value-type="string" calcext:value-type="string">
            <text:p>青</text:p>
          </table:table-cell>
          <table:table-cell table:formula="of:=VLOOKUP([.M363];[$色番号.$A$1:$色番号.$B$10];2;0)" office:value-type="float" office:value="2" calcext:value-type="float">
            <text:p>2</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Q36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3];[$特性番号.$A$1:$特性番号.$B$8];2;0);0)" office:value-type="float" office:value="0" calcext:value-type="float">
            <text:p>0</text:p>
          </table:table-cell>
          <table:table-cell office:value-type="string" calcext:value-type="string">
            <text:p>相手の手札を見てレベル3以上のカード1つを墓地に置く。</text:p>
          </table:table-cell>
          <table:table-cell table:style-name="ce8" office:value-type="string" calcext:value-type="string">
            <text:p>冥府発動</text:p>
          </table:table-cell>
          <table:table-cell table:formula="of:=IFERROR(VLOOKUP([.$V363];[$遺業能力番号.$A$1:$遺業能力番号.$B$9];2;0);0)" office:value-type="float" office:value="2" calcext:value-type="float">
            <text:p>2</text:p>
          </table:table-cell>
          <table:table-cell office:value-type="string" calcext:value-type="string">
            <text:p>https://one-draw.jp/ijinden/cardlist/004/card/04_054.png</text:p>
          </table:table-cell>
          <table:table-cell table:formula="of:=CONCATENATE([$JSON.$A$1];[.$C363];[$JSON.$B$1];[.$E363];[$JSON.$C$1];[.$F363];[$JSON.$D$1];IF(ISNA([.$S363]);&quot;null&quot;;&quot;&quot;&quot;&quot;&amp;[.$S363]&amp;&quot;&quot;&quot;&quot;);[$JSON.$E$1];[.$U363];[$JSON.$F$1];IF(ISNA([.$V363]);&quot;null&quot;;&quot;&quot;&quot;&quot;&amp;[.$V363]&amp;&quot;&quot;&quot;&quot;);[$JSON.$G$1];[.$X363];[$JSON.$H$1];[.$H363];[$JSON.$I$1];[.J363];[$JSON.$J$1];[.$L363];[$JSON.$K$1];[.$O363];[$JSON.$L$1];[.$N363];[$JSON.$M$1];[.$R363];[$JSON.$N$1];[.$T363];[$JSON.$O$1];[.$W363];[$JSON.$P$1];[.$A363];[$JSON.$Q$1];[.$B363];[$JSON.$R$1])" office:value-type="string" office:string-value="{&quot;id&quot;:&quot;4-54&quot;,&quot;name&quot;:&quot;ドロレス&quot;,&quot;kana&quot;:&quot;どろれす&quot;,&quot;traitText&quot;:null,&quot;ruleText&quot;:&quot;相手の手札を見てレベル3以上のカード1つを墓地に置く。&quot;,&quot;legacyText&quot;:&quot;冥府発動&quot;,&quot;imageUrl&quot;:&quot;https://one-draw.jp/ijinden/cardlist/004/card/04_054.png&quot;,&quot;expansion&quot;:45,&quot;rarity&quot;:1,&quot;type&quot;:3,&quot;level&quot;:1,&quot;color&quot;:2,&quot;term&quot;:0,&quot;trait&quot;:0,&quot;legacy&quot;:2,&quot;orderTable&quot;:363,&quot;orderDeck&quot;:283}," calcext:value-type="string">
            <text:p>{"id":"4-54","name":"ドロレス","kana":"どろれす","traitText":null,"ruleText":"相手の手札を見てレベル3以上のカード1つを墓地に置く。","legacyText":"冥府発動","imageUrl":"https://one-draw.jp/ijinden/cardlist/004/card/04_054.png","expansion":45,"rarity":1,"type":3,"level":1,"color":2,"term":0,"trait":0,"legacy":2,"orderTable":363,"orderDeck":283},</text:p>
          </table:table-cell>
          <table:table-cell table:number-columns-repeated="16347"/>
        </table:table-row>
        <table:table-row table:style-name="ro2">
          <table:table-cell office:value-type="float" office:value="364" calcext:value-type="float">
            <text:p>364</text:p>
          </table:table-cell>
          <table:table-cell office:value-type="float" office:value="327" calcext:value-type="float">
            <text:p>327</text:p>
          </table:table-cell>
          <table:table-cell office:value-type="string" calcext:value-type="string">
            <text:p>4-55</text:p>
          </table:table-cell>
          <table:table-cell office:value-type="float" office:value="55" calcext:value-type="float">
            <text:p>55</text:p>
          </table:table-cell>
          <table:table-cell office:value-type="string" calcext:value-type="string">
            <text:p>デュエル</text:p>
          </table:table-cell>
          <table:table-cell office:value-type="string" calcext:value-type="string">
            <text:p>でゅえる</text:p>
          </table:table-cell>
          <table:table-cell office:value-type="string" calcext:value-type="string">
            <text:p>第４弾ブースターパック</text:p>
          </table:table-cell>
          <table:table-cell table:formula="of:=VLOOKUP([.G364];[$収録番号.$A$1:$収録番号.$B$9];2;0)" office:value-type="float" office:value="45" calcext:value-type="float">
            <text:p>45</text:p>
          </table:table-cell>
          <table:table-cell office:value-type="string" calcext:value-type="string">
            <text:p>N</text:p>
          </table:table-cell>
          <table:table-cell table:formula="of:=VLOOKUP([.I364];[$レアリティ番号.$A$1:$レアリティ番号.$B$4];2;0)" office:value-type="float" office:value="1" calcext:value-type="float">
            <text:p>1</text:p>
          </table:table-cell>
          <table:table-cell office:value-type="string" calcext:value-type="string">
            <text:p>マホウ</text:p>
          </table:table-cell>
          <table:table-cell table:formula="of:=VLOOKUP([.K364];[$種類番号.$A$1:$種類番号.$B$4];2;0)" office:value-type="float" office:value="3" calcext:value-type="float">
            <text:p>3</text:p>
          </table:table-cell>
          <table:table-cell office:value-type="string" calcext:value-type="string">
            <text:p>緑</text:p>
          </table:table-cell>
          <table:table-cell table:formula="of:=VLOOKUP([.M364];[$色番号.$A$1:$色番号.$B$10];2;0)"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36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4];[$特性番号.$A$1:$特性番号.$B$8];2;0);0)" office:value-type="float" office:value="0" calcext:value-type="float">
            <text:p>0</text:p>
          </table:table-cell>
          <table:table-cell office:value-type="string" calcext:value-type="string">
            <text:p>自分の戦場の起きているイジン1体と、相手の戦場のイジン1体を指定して発動できる。パワーが高い方のイジンを寝かせて、低い方のイジンを墓地に置く。同じならどちらも寝かせる。</text:p>
          </table:table-cell>
          <table:table-cell table:style-name="ce8" office:value-type="string" calcext:value-type="string">
            <text:p>魔力化</text:p>
          </table:table-cell>
          <table:table-cell table:formula="of:=IFERROR(VLOOKUP([.$V364];[$遺業能力番号.$A$1:$遺業能力番号.$B$9];2;0);0)" office:value-type="float" office:value="1" calcext:value-type="float">
            <text:p>1</text:p>
          </table:table-cell>
          <table:table-cell office:value-type="string" calcext:value-type="string">
            <text:p>https://one-draw.jp/ijinden/cardlist/004/card/04_055.png</text:p>
          </table:table-cell>
          <table:table-cell table:formula="of:=CONCATENATE([$JSON.$A$1];[.$C364];[$JSON.$B$1];[.$E364];[$JSON.$C$1];[.$F364];[$JSON.$D$1];IF(ISNA([.$S364]);&quot;null&quot;;&quot;&quot;&quot;&quot;&amp;[.$S364]&amp;&quot;&quot;&quot;&quot;);[$JSON.$E$1];[.$U364];[$JSON.$F$1];IF(ISNA([.$V364]);&quot;null&quot;;&quot;&quot;&quot;&quot;&amp;[.$V364]&amp;&quot;&quot;&quot;&quot;);[$JSON.$G$1];[.$X364];[$JSON.$H$1];[.$H364];[$JSON.$I$1];[.J364];[$JSON.$J$1];[.$L364];[$JSON.$K$1];[.$O364];[$JSON.$L$1];[.$N364];[$JSON.$M$1];[.$R364];[$JSON.$N$1];[.$T364];[$JSON.$O$1];[.$W364];[$JSON.$P$1];[.$A364];[$JSON.$Q$1];[.$B364];[$JSON.$R$1])" office:value-type="string" office:string-value="{&quot;id&quot;:&quot;4-55&quot;,&quot;name&quot;:&quot;デュエル&quot;,&quot;kana&quot;:&quot;でゅえる&quot;,&quot;traitText&quot;:null,&quot;ruleText&quot;:&quot;自分の戦場の起きているイジン1体と、相手の戦場のイジン1体を指定して発動できる。パワーが高い方のイジンを寝かせて、低い方のイジンを墓地に置く。同じならどちらも寝かせる。&quot;,&quot;legacyText&quot;:&quot;魔力化&quot;,&quot;imageUrl&quot;:&quot;https://one-draw.jp/ijinden/cardlist/004/card/04_055.png&quot;,&quot;expansion&quot;:45,&quot;rarity&quot;:1,&quot;type&quot;:3,&quot;level&quot;:5,&quot;color&quot;:4,&quot;term&quot;:0,&quot;trait&quot;:0,&quot;legacy&quot;:1,&quot;orderTable&quot;:364,&quot;orderDeck&quot;:327}," calcext:value-type="string">
            <text:p>{"id":"4-55","name":"デュエル","kana":"でゅえる","traitText":null,"ruleText":"自分の戦場の起きているイジン1体と、相手の戦場のイジン1体を指定して発動できる。パワーが高い方のイジンを寝かせて、低い方のイジンを墓地に置く。同じならどちらも寝かせる。","legacyText":"魔力化","imageUrl":"https://one-draw.jp/ijinden/cardlist/004/card/04_055.png","expansion":45,"rarity":1,"type":3,"level":5,"color":4,"term":0,"trait":0,"legacy":1,"orderTable":364,"orderDeck":327},</text:p>
          </table:table-cell>
          <table:table-cell table:number-columns-repeated="16347"/>
        </table:table-row>
        <table:table-row table:style-name="ro2">
          <table:table-cell office:value-type="float" office:value="365" calcext:value-type="float">
            <text:p>365</text:p>
          </table:table-cell>
          <table:table-cell office:value-type="float" office:value="310" calcext:value-type="float">
            <text:p>310</text:p>
          </table:table-cell>
          <table:table-cell office:value-type="string" calcext:value-type="string">
            <text:p>4-56</text:p>
          </table:table-cell>
          <table:table-cell office:value-type="float" office:value="56" calcext:value-type="float">
            <text:p>56</text:p>
          </table:table-cell>
          <table:table-cell office:value-type="string" calcext:value-type="string">
            <text:p>サーベイング</text:p>
          </table:table-cell>
          <table:table-cell office:value-type="string" calcext:value-type="string">
            <text:p>さーべいんぐ</text:p>
          </table:table-cell>
          <table:table-cell office:value-type="string" calcext:value-type="string">
            <text:p>第４弾ブースターパック</text:p>
          </table:table-cell>
          <table:table-cell table:formula="of:=VLOOKUP([.G365];[$収録番号.$A$1:$収録番号.$B$9];2;0)" office:value-type="float" office:value="45" calcext:value-type="float">
            <text:p>45</text:p>
          </table:table-cell>
          <table:table-cell office:value-type="string" calcext:value-type="string">
            <text:p>N</text:p>
          </table:table-cell>
          <table:table-cell table:formula="of:=VLOOKUP([.I365];[$レアリティ番号.$A$1:$レアリティ番号.$B$4];2;0)" office:value-type="float" office:value="1" calcext:value-type="float">
            <text:p>1</text:p>
          </table:table-cell>
          <table:table-cell office:value-type="string" calcext:value-type="string">
            <text:p>マホウ</text:p>
          </table:table-cell>
          <table:table-cell table:formula="of:=VLOOKUP([.K365];[$種類番号.$A$1:$種類番号.$B$4];2;0)" office:value-type="float" office:value="3" calcext:value-type="float">
            <text:p>3</text:p>
          </table:table-cell>
          <table:table-cell office:value-type="string" calcext:value-type="string">
            <text:p>緑</text:p>
          </table:table-cell>
          <table:table-cell table:formula="of:=VLOOKUP([.M365];[$色番号.$A$1:$色番号.$B$10];2;0)"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36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5];[$特性番号.$A$1:$特性番号.$B$8];2;0);0)" office:value-type="float" office:value="0" calcext:value-type="float">
            <text:p>0</text:p>
          </table:table-cell>
          <table:table-cell office:value-type="string" calcext:value-type="string">
            <text:p>自分の手札のハイケイを1つ以上指定して発動できる。それらのハイケイすべてを墓地に置いて、墓地に置いたハイケイのレベルの合計5につき1ドローする。</text:p>
          </table:table-cell>
          <table:table-cell table:style-name="ce8" office:value-type="string" calcext:value-type="string">
            <text:p>魔力化</text:p>
          </table:table-cell>
          <table:table-cell table:formula="of:=IFERROR(VLOOKUP([.$V365];[$遺業能力番号.$A$1:$遺業能力番号.$B$9];2;0);0)" office:value-type="float" office:value="1" calcext:value-type="float">
            <text:p>1</text:p>
          </table:table-cell>
          <table:table-cell office:value-type="string" calcext:value-type="string">
            <text:p>https://one-draw.jp/ijinden/cardlist/004/card/04_056.png</text:p>
          </table:table-cell>
          <table:table-cell table:formula="of:=CONCATENATE([$JSON.$A$1];[.$C365];[$JSON.$B$1];[.$E365];[$JSON.$C$1];[.$F365];[$JSON.$D$1];IF(ISNA([.$S365]);&quot;null&quot;;&quot;&quot;&quot;&quot;&amp;[.$S365]&amp;&quot;&quot;&quot;&quot;);[$JSON.$E$1];[.$U365];[$JSON.$F$1];IF(ISNA([.$V365]);&quot;null&quot;;&quot;&quot;&quot;&quot;&amp;[.$V365]&amp;&quot;&quot;&quot;&quot;);[$JSON.$G$1];[.$X365];[$JSON.$H$1];[.$H365];[$JSON.$I$1];[.J365];[$JSON.$J$1];[.$L365];[$JSON.$K$1];[.$O365];[$JSON.$L$1];[.$N365];[$JSON.$M$1];[.$R365];[$JSON.$N$1];[.$T365];[$JSON.$O$1];[.$W365];[$JSON.$P$1];[.$A365];[$JSON.$Q$1];[.$B365];[$JSON.$R$1])" office:value-type="string" office:string-value="{&quot;id&quot;:&quot;4-56&quot;,&quot;name&quot;:&quot;サーベイング&quot;,&quot;kana&quot;:&quot;さーべいんぐ&quot;,&quot;traitText&quot;:null,&quot;ruleText&quot;:&quot;自分の手札のハイケイを1つ以上指定して発動できる。それらのハイケイすべてを墓地に置いて、墓地に置いたハイケイのレベルの合計5につき1ドローする。&quot;,&quot;legacyText&quot;:&quot;魔力化&quot;,&quot;imageUrl&quot;:&quot;https://one-draw.jp/ijinden/cardlist/004/card/04_056.png&quot;,&quot;expansion&quot;:45,&quot;rarity&quot;:1,&quot;type&quot;:3,&quot;level&quot;:3,&quot;color&quot;:4,&quot;term&quot;:0,&quot;trait&quot;:0,&quot;legacy&quot;:1,&quot;orderTable&quot;:365,&quot;orderDeck&quot;:310}," calcext:value-type="string">
            <text:p>{"id":"4-56","name":"サーベイング","kana":"さーべいんぐ","traitText":null,"ruleText":"自分の手札のハイケイを1つ以上指定して発動できる。それらのハイケイすべてを墓地に置いて、墓地に置いたハイケイのレベルの合計5につき1ドローする。","legacyText":"魔力化","imageUrl":"https://one-draw.jp/ijinden/cardlist/004/card/04_056.png","expansion":45,"rarity":1,"type":3,"level":3,"color":4,"term":0,"trait":0,"legacy":1,"orderTable":365,"orderDeck":310},</text:p>
          </table:table-cell>
          <table:table-cell table:number-columns-repeated="16347"/>
        </table:table-row>
        <table:table-row table:style-name="ro2">
          <table:table-cell office:value-type="float" office:value="366" calcext:value-type="float">
            <text:p>366</text:p>
          </table:table-cell>
          <table:table-cell office:value-type="float" office:value="311" calcext:value-type="float">
            <text:p>311</text:p>
          </table:table-cell>
          <table:table-cell office:value-type="string" calcext:value-type="string">
            <text:p>4-57</text:p>
          </table:table-cell>
          <table:table-cell office:value-type="float" office:value="57" calcext:value-type="float">
            <text:p>57</text:p>
          </table:table-cell>
          <table:table-cell office:value-type="string" calcext:value-type="string">
            <text:p>ソレイユ</text:p>
          </table:table-cell>
          <table:table-cell office:value-type="string" calcext:value-type="string">
            <text:p>それいゆ</text:p>
          </table:table-cell>
          <table:table-cell office:value-type="string" calcext:value-type="string">
            <text:p>第４弾ブースターパック</text:p>
          </table:table-cell>
          <table:table-cell table:formula="of:=VLOOKUP([.G366];[$収録番号.$A$1:$収録番号.$B$9];2;0)" office:value-type="float" office:value="45" calcext:value-type="float">
            <text:p>45</text:p>
          </table:table-cell>
          <table:table-cell office:value-type="string" calcext:value-type="string">
            <text:p>N</text:p>
          </table:table-cell>
          <table:table-cell table:formula="of:=VLOOKUP([.I366];[$レアリティ番号.$A$1:$レアリティ番号.$B$4];2;0)" office:value-type="float" office:value="1" calcext:value-type="float">
            <text:p>1</text:p>
          </table:table-cell>
          <table:table-cell office:value-type="string" calcext:value-type="string">
            <text:p>マホウ</text:p>
          </table:table-cell>
          <table:table-cell table:formula="of:=VLOOKUP([.K366];[$種類番号.$A$1:$種類番号.$B$4];2;0)" office:value-type="float" office:value="3" calcext:value-type="float">
            <text:p>3</text:p>
          </table:table-cell>
          <table:table-cell office:value-type="string" calcext:value-type="string">
            <text:p>黄</text:p>
          </table:table-cell>
          <table:table-cell table:formula="of:=VLOOKUP([.M366];[$色番号.$A$1:$色番号.$B$10];2;0)" office:value-type="float" office:value="8" calcext:value-type="float">
            <text:p>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赤魔導</text:p>
          </table:table-cell>
          <table:table-cell table:formula="of:=IFERROR(VLOOKUP([.$Q366];[$能力語番号.$A$1:$能力語番号.$B$10];2;0);0)" office:value-type="float" office:value="48" calcext:value-type="float">
            <text:p>48</text:p>
          </table:table-cell>
          <table:table-cell table:formula="of:=NA()" office:value-type="string" office:string-value="" calcext:value-type="error">
            <text:p>#N/A</text:p>
          </table:table-cell>
          <table:table-cell table:formula="of:=IFERROR(VLOOKUP([.$S366];[$特性番号.$A$1:$特性番号.$B$8];2;0);0)" office:value-type="float" office:value="0" calcext:value-type="float">
            <text:p>0</text:p>
          </table:table-cell>
          <table:table-cell office:value-type="string" calcext:value-type="string">
            <text:p>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text:p>
          </table:table-cell>
          <table:table-cell table:style-name="ce8" office:value-type="string" calcext:value-type="string">
            <text:p>冥府発動</text:p>
          </table:table-cell>
          <table:table-cell table:formula="of:=IFERROR(VLOOKUP([.$V366];[$遺業能力番号.$A$1:$遺業能力番号.$B$9];2;0);0)" office:value-type="float" office:value="2" calcext:value-type="float">
            <text:p>2</text:p>
          </table:table-cell>
          <table:table-cell office:value-type="string" calcext:value-type="string">
            <text:p>https://one-draw.jp/ijinden/cardlist/004/card/04_057.png</text:p>
          </table:table-cell>
          <table:table-cell table:formula="of:=CONCATENATE([$JSON.$A$1];[.$C366];[$JSON.$B$1];[.$E366];[$JSON.$C$1];[.$F366];[$JSON.$D$1];IF(ISNA([.$S366]);&quot;null&quot;;&quot;&quot;&quot;&quot;&amp;[.$S366]&amp;&quot;&quot;&quot;&quot;);[$JSON.$E$1];[.$U366];[$JSON.$F$1];IF(ISNA([.$V366]);&quot;null&quot;;&quot;&quot;&quot;&quot;&amp;[.$V366]&amp;&quot;&quot;&quot;&quot;);[$JSON.$G$1];[.$X366];[$JSON.$H$1];[.$H366];[$JSON.$I$1];[.J366];[$JSON.$J$1];[.$L366];[$JSON.$K$1];[.$O366];[$JSON.$L$1];[.$N366];[$JSON.$M$1];[.$R366];[$JSON.$N$1];[.$T366];[$JSON.$O$1];[.$W366];[$JSON.$P$1];[.$A366];[$JSON.$Q$1];[.$B366];[$JSON.$R$1])" office:value-type="string" office:string-value="{&quot;id&quot;:&quot;4-57&quot;,&quot;name&quot;:&quot;ソレイユ&quot;,&quot;kana&quot;:&quot;それいゆ&quot;,&quot;traitText&quot;:null,&quot;ruleText&quot;:&quot;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quot;,&quot;legacyText&quot;:&quot;冥府発動&quot;,&quot;imageUrl&quot;:&quot;https://one-draw.jp/ijinden/cardlist/004/card/04_057.png&quot;,&quot;expansion&quot;:45,&quot;rarity&quot;:1,&quot;type&quot;:3,&quot;level&quot;:3,&quot;color&quot;:8,&quot;term&quot;:48,&quot;trait&quot;:0,&quot;legacy&quot;:2,&quot;orderTable&quot;:366,&quot;orderDeck&quot;:311}," calcext:value-type="string">
            <text:p>{"id":"4-57","name":"ソレイユ","kana":"それいゆ","traitText":null,"ruleText":"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legacyText":"冥府発動","imageUrl":"https://one-draw.jp/ijinden/cardlist/004/card/04_057.png","expansion":45,"rarity":1,"type":3,"level":3,"color":8,"term":48,"trait":0,"legacy":2,"orderTable":366,"orderDeck":311},</text:p>
          </table:table-cell>
          <table:table-cell table:number-columns-repeated="16347"/>
        </table:table-row>
        <table:table-row table:style-name="ro2">
          <table:table-cell office:value-type="float" office:value="367" calcext:value-type="float">
            <text:p>367</text:p>
          </table:table-cell>
          <table:table-cell office:value-type="float" office:value="312" calcext:value-type="float">
            <text:p>312</text:p>
          </table:table-cell>
          <table:table-cell office:value-type="string" calcext:value-type="string">
            <text:p>4-58</text:p>
          </table:table-cell>
          <table:table-cell office:value-type="float" office:value="58" calcext:value-type="float">
            <text:p>58</text:p>
          </table:table-cell>
          <table:table-cell office:value-type="string" calcext:value-type="string">
            <text:p>ルーナ</text:p>
          </table:table-cell>
          <table:table-cell office:value-type="string" calcext:value-type="string">
            <text:p>るーな</text:p>
          </table:table-cell>
          <table:table-cell office:value-type="string" calcext:value-type="string">
            <text:p>第４弾ブースターパック</text:p>
          </table:table-cell>
          <table:table-cell table:formula="of:=VLOOKUP([.G367];[$収録番号.$A$1:$収録番号.$B$9];2;0)" office:value-type="float" office:value="45" calcext:value-type="float">
            <text:p>45</text:p>
          </table:table-cell>
          <table:table-cell office:value-type="string" calcext:value-type="string">
            <text:p>N</text:p>
          </table:table-cell>
          <table:table-cell table:formula="of:=VLOOKUP([.I367];[$レアリティ番号.$A$1:$レアリティ番号.$B$4];2;0)" office:value-type="float" office:value="1" calcext:value-type="float">
            <text:p>1</text:p>
          </table:table-cell>
          <table:table-cell office:value-type="string" calcext:value-type="string">
            <text:p>マホウ</text:p>
          </table:table-cell>
          <table:table-cell table:formula="of:=VLOOKUP([.K367];[$種類番号.$A$1:$種類番号.$B$4];2;0)" office:value-type="float" office:value="3" calcext:value-type="float">
            <text:p>3</text:p>
          </table:table-cell>
          <table:table-cell office:value-type="string" calcext:value-type="string">
            <text:p>黄</text:p>
          </table:table-cell>
          <table:table-cell table:formula="of:=VLOOKUP([.M367];[$色番号.$A$1:$色番号.$B$10];2;0)" office:value-type="float" office:value="8" calcext:value-type="float">
            <text:p>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青魔導</text:p>
          </table:table-cell>
          <table:table-cell table:formula="of:=IFERROR(VLOOKUP([.$Q367];[$能力語番号.$A$1:$能力語番号.$B$10];2;0);0)" office:value-type="float" office:value="80" calcext:value-type="float">
            <text:p>80</text:p>
          </table:table-cell>
          <table:table-cell table:formula="of:=NA()" office:value-type="string" office:string-value="" calcext:value-type="error">
            <text:p>#N/A</text:p>
          </table:table-cell>
          <table:table-cell table:formula="of:=IFERROR(VLOOKUP([.$S367];[$特性番号.$A$1:$特性番号.$B$8];2;0);0)" office:value-type="float" office:value="0" calcext:value-type="float">
            <text:p>0</text:p>
          </table:table-cell>
          <table:table-cell office:value-type="string" calcext:value-type="string">
            <text:p>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text:p>
          </table:table-cell>
          <table:table-cell table:style-name="ce8" office:value-type="string" calcext:value-type="string">
            <text:p>冥府発動</text:p>
          </table:table-cell>
          <table:table-cell table:formula="of:=IFERROR(VLOOKUP([.$V367];[$遺業能力番号.$A$1:$遺業能力番号.$B$9];2;0);0)" office:value-type="float" office:value="2" calcext:value-type="float">
            <text:p>2</text:p>
          </table:table-cell>
          <table:table-cell office:value-type="string" calcext:value-type="string">
            <text:p>https://one-draw.jp/ijinden/cardlist/004/card/04_058.png</text:p>
          </table:table-cell>
          <table:table-cell table:formula="of:=CONCATENATE([$JSON.$A$1];[.$C367];[$JSON.$B$1];[.$E367];[$JSON.$C$1];[.$F367];[$JSON.$D$1];IF(ISNA([.$S367]);&quot;null&quot;;&quot;&quot;&quot;&quot;&amp;[.$S367]&amp;&quot;&quot;&quot;&quot;);[$JSON.$E$1];[.$U367];[$JSON.$F$1];IF(ISNA([.$V367]);&quot;null&quot;;&quot;&quot;&quot;&quot;&amp;[.$V367]&amp;&quot;&quot;&quot;&quot;);[$JSON.$G$1];[.$X367];[$JSON.$H$1];[.$H367];[$JSON.$I$1];[.J367];[$JSON.$J$1];[.$L367];[$JSON.$K$1];[.$O367];[$JSON.$L$1];[.$N367];[$JSON.$M$1];[.$R367];[$JSON.$N$1];[.$T367];[$JSON.$O$1];[.$W367];[$JSON.$P$1];[.$A367];[$JSON.$Q$1];[.$B367];[$JSON.$R$1])" office:value-type="string" office:string-value="{&quot;id&quot;:&quot;4-58&quot;,&quot;name&quot;:&quot;ルーナ&quot;,&quot;kana&quot;:&quot;るーな&quot;,&quot;traitText&quot;:null,&quot;ruleText&quot;:&quot;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quot;,&quot;legacyText&quot;:&quot;冥府発動&quot;,&quot;imageUrl&quot;:&quot;https://one-draw.jp/ijinden/cardlist/004/card/04_058.png&quot;,&quot;expansion&quot;:45,&quot;rarity&quot;:1,&quot;type&quot;:3,&quot;level&quot;:3,&quot;color&quot;:8,&quot;term&quot;:80,&quot;trait&quot;:0,&quot;legacy&quot;:2,&quot;orderTable&quot;:367,&quot;orderDeck&quot;:312}," calcext:value-type="string">
            <text:p>{"id":"4-58","name":"ルーナ","kana":"るーな","traitText":null,"ruleText":"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legacyText":"冥府発動","imageUrl":"https://one-draw.jp/ijinden/cardlist/004/card/04_058.png","expansion":45,"rarity":1,"type":3,"level":3,"color":8,"term":80,"trait":0,"legacy":2,"orderTable":367,"orderDeck":312},</text:p>
          </table:table-cell>
          <table:table-cell table:number-columns-repeated="16347"/>
        </table:table-row>
        <table:table-row table:style-name="ro2">
          <table:table-cell office:value-type="float" office:value="368" calcext:value-type="float">
            <text:p>368</text:p>
          </table:table-cell>
          <table:table-cell office:value-type="float" office:value="331" calcext:value-type="float">
            <text:p>331</text:p>
          </table:table-cell>
          <table:table-cell office:value-type="string" calcext:value-type="string">
            <text:p>4-59</text:p>
          </table:table-cell>
          <table:table-cell office:value-type="float" office:value="59" calcext:value-type="float">
            <text:p>59</text:p>
          </table:table-cell>
          <table:table-cell office:value-type="string" calcext:value-type="string">
            <text:p>リユニオン</text:p>
          </table:table-cell>
          <table:table-cell office:value-type="string" calcext:value-type="string">
            <text:p>りゆにおん</text:p>
          </table:table-cell>
          <table:table-cell office:value-type="string" calcext:value-type="string">
            <text:p>第４弾ブースターパック</text:p>
          </table:table-cell>
          <table:table-cell table:formula="of:=VLOOKUP([.G368];[$収録番号.$A$1:$収録番号.$B$9];2;0)" office:value-type="float" office:value="45" calcext:value-type="float">
            <text:p>45</text:p>
          </table:table-cell>
          <table:table-cell office:value-type="string" calcext:value-type="string">
            <text:p>N</text:p>
          </table:table-cell>
          <table:table-cell table:formula="of:=VLOOKUP([.I368];[$レアリティ番号.$A$1:$レアリティ番号.$B$4];2;0)" office:value-type="float" office:value="1" calcext:value-type="float">
            <text:p>1</text:p>
          </table:table-cell>
          <table:table-cell office:value-type="string" calcext:value-type="string">
            <text:p>マホウ</text:p>
          </table:table-cell>
          <table:table-cell table:formula="of:=VLOOKUP([.K368];[$種類番号.$A$1:$種類番号.$B$4];2;0)" office:value-type="float" office:value="3" calcext:value-type="float">
            <text:p>3</text:p>
          </table:table-cell>
          <table:table-cell office:value-type="string" calcext:value-type="string">
            <text:p>紫</text:p>
          </table:table-cell>
          <table:table-cell table:formula="of:=VLOOKUP([.M368];[$色番号.$A$1:$色番号.$B$10];2;0)" office:value-type="float" office:value="16" calcext:value-type="float">
            <text:p>16</text:p>
          </table:table-cell>
          <table:table-cell office:value-type="float" office:value="5" calcext:value-type="float">
            <text:p>5</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3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8];[$特性番号.$A$1:$特性番号.$B$8];2;0);0)" office:value-type="float" office:value="0" calcext:value-type="float">
            <text:p>0</text:p>
          </table:table-cell>
          <table:table-cell office:value-type="string" calcext:value-type="string">
            <text:p>自分の戦場のイジン1体以上を指定して発動できる。それらのイジンすべてを手札に戻して、戻したイジン1体につきイジン召喚権+1する。</text:p>
          </table:table-cell>
          <table:table-cell table:style-name="ce8" office:value-type="string" calcext:value-type="string">
            <text:p>魔力化</text:p>
          </table:table-cell>
          <table:table-cell table:formula="of:=IFERROR(VLOOKUP([.$V368];[$遺業能力番号.$A$1:$遺業能力番号.$B$9];2;0);0)" office:value-type="float" office:value="1" calcext:value-type="float">
            <text:p>1</text:p>
          </table:table-cell>
          <table:table-cell office:value-type="string" calcext:value-type="string">
            <text:p>https://one-draw.jp/ijinden/cardlist/004/card/04_059.png</text:p>
          </table:table-cell>
          <table:table-cell table:formula="of:=CONCATENATE([$JSON.$A$1];[.$C368];[$JSON.$B$1];[.$E368];[$JSON.$C$1];[.$F368];[$JSON.$D$1];IF(ISNA([.$S368]);&quot;null&quot;;&quot;&quot;&quot;&quot;&amp;[.$S368]&amp;&quot;&quot;&quot;&quot;);[$JSON.$E$1];[.$U368];[$JSON.$F$1];IF(ISNA([.$V368]);&quot;null&quot;;&quot;&quot;&quot;&quot;&amp;[.$V368]&amp;&quot;&quot;&quot;&quot;);[$JSON.$G$1];[.$X368];[$JSON.$H$1];[.$H368];[$JSON.$I$1];[.J368];[$JSON.$J$1];[.$L368];[$JSON.$K$1];[.$O368];[$JSON.$L$1];[.$N368];[$JSON.$M$1];[.$R368];[$JSON.$N$1];[.$T368];[$JSON.$O$1];[.$W368];[$JSON.$P$1];[.$A368];[$JSON.$Q$1];[.$B368];[$JSON.$R$1])" office:value-type="string" office:string-value="{&quot;id&quot;:&quot;4-59&quot;,&quot;name&quot;:&quot;リユニオン&quot;,&quot;kana&quot;:&quot;りゆにおん&quot;,&quot;traitText&quot;:null,&quot;ruleText&quot;:&quot;自分の戦場のイジン1体以上を指定して発動できる。それらのイジンすべてを手札に戻して、戻したイジン1体につきイジン召喚権+1する。&quot;,&quot;legacyText&quot;:&quot;魔力化&quot;,&quot;imageUrl&quot;:&quot;https://one-draw.jp/ijinden/cardlist/004/card/04_059.png&quot;,&quot;expansion&quot;:45,&quot;rarity&quot;:1,&quot;type&quot;:3,&quot;level&quot;:5,&quot;color&quot;:16,&quot;term&quot;:0,&quot;trait&quot;:0,&quot;legacy&quot;:1,&quot;orderTable&quot;:368,&quot;orderDeck&quot;:331}," calcext:value-type="string">
            <text:p>{"id":"4-59","name":"リユニオン","kana":"りゆにおん","traitText":null,"ruleText":"自分の戦場のイジン1体以上を指定して発動できる。それらのイジンすべてを手札に戻して、戻したイジン1体につきイジン召喚権+1する。","legacyText":"魔力化","imageUrl":"https://one-draw.jp/ijinden/cardlist/004/card/04_059.png","expansion":45,"rarity":1,"type":3,"level":5,"color":16,"term":0,"trait":0,"legacy":1,"orderTable":368,"orderDeck":331},</text:p>
          </table:table-cell>
          <table:table-cell table:number-columns-repeated="16347"/>
        </table:table-row>
        <table:table-row table:style-name="ro2">
          <table:table-cell office:value-type="float" office:value="369" calcext:value-type="float">
            <text:p>369</text:p>
          </table:table-cell>
          <table:table-cell office:value-type="float" office:value="335" calcext:value-type="float">
            <text:p>335</text:p>
          </table:table-cell>
          <table:table-cell office:value-type="string" calcext:value-type="string">
            <text:p>4-60</text:p>
          </table:table-cell>
          <table:table-cell office:value-type="float" office:value="60" calcext:value-type="float">
            <text:p>60</text:p>
          </table:table-cell>
          <table:table-cell office:value-type="string" calcext:value-type="string">
            <text:p>ドッペルゲンガー</text:p>
          </table:table-cell>
          <table:table-cell office:value-type="string" calcext:value-type="string">
            <text:p>どっぺるげんがー</text:p>
          </table:table-cell>
          <table:table-cell office:value-type="string" calcext:value-type="string">
            <text:p>第４弾ブースターパック</text:p>
          </table:table-cell>
          <table:table-cell table:formula="of:=VLOOKUP([.G369];[$収録番号.$A$1:$収録番号.$B$9];2;0)" office:value-type="float" office:value="45" calcext:value-type="float">
            <text:p>45</text:p>
          </table:table-cell>
          <table:table-cell office:value-type="string" calcext:value-type="string">
            <text:p>N</text:p>
          </table:table-cell>
          <table:table-cell table:formula="of:=VLOOKUP([.I369];[$レアリティ番号.$A$1:$レアリティ番号.$B$4];2;0)" office:value-type="float" office:value="1" calcext:value-type="float">
            <text:p>1</text:p>
          </table:table-cell>
          <table:table-cell office:value-type="string" calcext:value-type="string">
            <text:p>マホウ</text:p>
          </table:table-cell>
          <table:table-cell table:formula="of:=VLOOKUP([.K369];[$種類番号.$A$1:$種類番号.$B$4];2;0)" office:value-type="float" office:value="3" calcext:value-type="float">
            <text:p>3</text:p>
          </table:table-cell>
          <table:table-cell office:value-type="string" calcext:value-type="string">
            <text:p>紫</text:p>
          </table:table-cell>
          <table:table-cell table:formula="of:=VLOOKUP([.M369];[$色番号.$A$1:$色番号.$B$10];2;0)" office:value-type="float" office:value="16" calcext:value-type="float">
            <text:p>16</text:p>
          </table:table-cell>
          <table:table-cell office:value-type="float" office:value="7" calcext:value-type="float">
            <text:p>7</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Q36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9];[$特性番号.$A$1:$特性番号.$B$8];2;0);0)" office:value-type="float" office:value="0" calcext:value-type="float">
            <text:p>0</text:p>
          </table:table-cell>
          <table:table-cell office:value-type="string" calcext:value-type="string">
            <text:p>相手の手札を見て、相手の手札と戦場と墓地で、同じカード名を持つ、マリョクでないカードすべてを墓地に置く。</text:p>
          </table:table-cell>
          <table:table-cell table:style-name="ce8" office:value-type="string" calcext:value-type="string">
            <text:p>手札に戻す</text:p>
          </table:table-cell>
          <table:table-cell table:formula="of:=IFERROR(VLOOKUP([.$V369];[$遺業能力番号.$A$1:$遺業能力番号.$B$9];2;0);0)" office:value-type="float" office:value="5" calcext:value-type="float">
            <text:p>5</text:p>
          </table:table-cell>
          <table:table-cell office:value-type="string" calcext:value-type="string">
            <text:p>https://one-draw.jp/ijinden/cardlist/004/card/04_060.png</text:p>
          </table:table-cell>
          <table:table-cell table:formula="of:=CONCATENATE([$JSON.$A$1];[.$C369];[$JSON.$B$1];[.$E369];[$JSON.$C$1];[.$F369];[$JSON.$D$1];IF(ISNA([.$S369]);&quot;null&quot;;&quot;&quot;&quot;&quot;&amp;[.$S369]&amp;&quot;&quot;&quot;&quot;);[$JSON.$E$1];[.$U369];[$JSON.$F$1];IF(ISNA([.$V369]);&quot;null&quot;;&quot;&quot;&quot;&quot;&amp;[.$V369]&amp;&quot;&quot;&quot;&quot;);[$JSON.$G$1];[.$X369];[$JSON.$H$1];[.$H369];[$JSON.$I$1];[.J369];[$JSON.$J$1];[.$L369];[$JSON.$K$1];[.$O369];[$JSON.$L$1];[.$N369];[$JSON.$M$1];[.$R369];[$JSON.$N$1];[.$T369];[$JSON.$O$1];[.$W369];[$JSON.$P$1];[.$A369];[$JSON.$Q$1];[.$B369];[$JSON.$R$1])" office:value-type="string" office:string-value="{&quot;id&quot;:&quot;4-60&quot;,&quot;name&quot;:&quot;ドッペルゲンガー&quot;,&quot;kana&quot;:&quot;どっぺるげんがー&quot;,&quot;traitText&quot;:null,&quot;ruleText&quot;:&quot;相手の手札を見て、相手の手札と戦場と墓地で、同じカード名を持つ、マリョクでないカードすべてを墓地に置く。&quot;,&quot;legacyText&quot;:&quot;手札に戻す&quot;,&quot;imageUrl&quot;:&quot;https://one-draw.jp/ijinden/cardlist/004/card/04_060.png&quot;,&quot;expansion&quot;:45,&quot;rarity&quot;:1,&quot;type&quot;:3,&quot;level&quot;:7,&quot;color&quot;:16,&quot;term&quot;:0,&quot;trait&quot;:0,&quot;legacy&quot;:5,&quot;orderTable&quot;:369,&quot;orderDeck&quot;:335}," calcext:value-type="string">
            <text:p>{"id":"4-60","name":"ドッペルゲンガー","kana":"どっぺるげんがー","traitText":null,"ruleText":"相手の手札を見て、相手の手札と戦場と墓地で、同じカード名を持つ、マリョクでないカードすべてを墓地に置く。","legacyText":"手札に戻す","imageUrl":"https://one-draw.jp/ijinden/cardlist/004/card/04_060.png","expansion":45,"rarity":1,"type":3,"level":7,"color":16,"term":0,"trait":0,"legacy":5,"orderTable":369,"orderDeck":335},</text:p>
          </table:table-cell>
          <table:table-cell table:number-columns-repeated="16347"/>
        </table:table-row>
        <table:table-row table:style-name="ro2">
          <table:table-cell office:value-type="float" office:value="370" calcext:value-type="float">
            <text:p>370</text:p>
          </table:table-cell>
          <table:table-cell office:value-type="float" office:value="287" calcext:value-type="float">
            <text:p>287</text:p>
          </table:table-cell>
          <table:table-cell office:value-type="string" calcext:value-type="string">
            <text:p>4-61</text:p>
          </table:table-cell>
          <table:table-cell office:value-type="float" office:value="61" calcext:value-type="float">
            <text:p>61</text:p>
          </table:table-cell>
          <table:table-cell office:value-type="string" calcext:value-type="string">
            <text:p>ソリッドビジョンα</text:p>
          </table:table-cell>
          <table:table-cell office:value-type="string" calcext:value-type="string">
            <text:p>そりっどびじょんあるふぁ</text:p>
          </table:table-cell>
          <table:table-cell office:value-type="string" calcext:value-type="string">
            <text:p>第４弾ブースターパック</text:p>
          </table:table-cell>
          <table:table-cell table:formula="of:=VLOOKUP([.G370];[$収録番号.$A$1:$収録番号.$B$9];2;0)" office:value-type="float" office:value="45" calcext:value-type="float">
            <text:p>45</text:p>
          </table:table-cell>
          <table:table-cell office:value-type="string" calcext:value-type="string">
            <text:p>N</text:p>
          </table:table-cell>
          <table:table-cell table:formula="of:=VLOOKUP([.I370];[$レアリティ番号.$A$1:$レアリティ番号.$B$4];2;0)" office:value-type="float" office:value="1" calcext:value-type="float">
            <text:p>1</text:p>
          </table:table-cell>
          <table:table-cell office:value-type="string" calcext:value-type="string">
            <text:p>マホウ</text:p>
          </table:table-cell>
          <table:table-cell table:formula="of:=VLOOKUP([.K370];[$種類番号.$A$1:$種類番号.$B$4];2;0)" office:value-type="float" office:value="3" calcext:value-type="float">
            <text:p>3</text:p>
          </table:table-cell>
          <table:table-cell office:value-type="string" calcext:value-type="string">
            <text:p>無色</text:p>
          </table:table-cell>
          <table:table-cell table:formula="of:=VLOOKUP([.M370];[$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赤魔導</text:p>
          </table:table-cell>
          <table:table-cell table:formula="of:=IFERROR(VLOOKUP([.$Q370];[$能力語番号.$A$1:$能力語番号.$B$10];2;0);0)" office:value-type="float" office:value="48" calcext:value-type="float">
            <text:p>48</text:p>
          </table:table-cell>
          <table:table-cell table:formula="of:=NA()" office:value-type="string" office:string-value="" calcext:value-type="error">
            <text:p>#N/A</text:p>
          </table:table-cell>
          <table:table-cell table:formula="of:=IFERROR(VLOOKUP([.$S370];[$特性番号.$A$1:$特性番号.$B$8];2;0);0)" office:value-type="float" office:value="0" calcext:value-type="float">
            <text:p>0</text:p>
          </table:table-cell>
          <table:table-cell office:value-type="string" calcext:value-type="string">
            <text:p>1ドローする。¶赤魔導 - 赤のカードが自分の戦場か自分の魔力ゾーンにあるなら「戦場のハイケイ1つを破壊する」を発揮してもよい。</text:p>
          </table:table-cell>
          <table:table-cell table:style-name="ce8" office:value-type="string" calcext:value-type="string">
            <text:p>冥府発動</text:p>
          </table:table-cell>
          <table:table-cell table:formula="of:=IFERROR(VLOOKUP([.$V370];[$遺業能力番号.$A$1:$遺業能力番号.$B$9];2;0);0)" office:value-type="float" office:value="2" calcext:value-type="float">
            <text:p>2</text:p>
          </table:table-cell>
          <table:table-cell office:value-type="string" calcext:value-type="string">
            <text:p>https://one-draw.jp/ijinden/cardlist/004/card/04_061.png</text:p>
          </table:table-cell>
          <table:table-cell table:formula="of:=CONCATENATE([$JSON.$A$1];[.$C370];[$JSON.$B$1];[.$E370];[$JSON.$C$1];[.$F370];[$JSON.$D$1];IF(ISNA([.$S370]);&quot;null&quot;;&quot;&quot;&quot;&quot;&amp;[.$S370]&amp;&quot;&quot;&quot;&quot;);[$JSON.$E$1];[.$U370];[$JSON.$F$1];IF(ISNA([.$V370]);&quot;null&quot;;&quot;&quot;&quot;&quot;&amp;[.$V370]&amp;&quot;&quot;&quot;&quot;);[$JSON.$G$1];[.$X370];[$JSON.$H$1];[.$H370];[$JSON.$I$1];[.J370];[$JSON.$J$1];[.$L370];[$JSON.$K$1];[.$O370];[$JSON.$L$1];[.$N370];[$JSON.$M$1];[.$R370];[$JSON.$N$1];[.$T370];[$JSON.$O$1];[.$W370];[$JSON.$P$1];[.$A370];[$JSON.$Q$1];[.$B370];[$JSON.$R$1])" office:value-type="string" office:string-value="{&quot;id&quot;:&quot;4-61&quot;,&quot;name&quot;:&quot;ソリッドビジョンα&quot;,&quot;kana&quot;:&quot;そりっどびじょんあるふぁ&quot;,&quot;traitText&quot;:null,&quot;ruleText&quot;:&quot;1ドローする。¶赤魔導 - 赤のカードが自分の戦場か自分の魔力ゾーンにあるなら「戦場のハイケイ1つを破壊する」を発揮してもよい。&quot;,&quot;legacyText&quot;:&quot;冥府発動&quot;,&quot;imageUrl&quot;:&quot;https://one-draw.jp/ijinden/cardlist/004/card/04_061.png&quot;,&quot;expansion&quot;:45,&quot;rarity&quot;:1,&quot;type&quot;:3,&quot;level&quot;:1,&quot;color&quot;:64,&quot;term&quot;:48,&quot;trait&quot;:0,&quot;legacy&quot;:2,&quot;orderTable&quot;:370,&quot;orderDeck&quot;:287}," calcext:value-type="string">
            <text:p>{"id":"4-61","name":"ソリッドビジョンα","kana":"そりっどびじょんあるふぁ","traitText":null,"ruleText":"1ドローする。¶赤魔導 - 赤のカードが自分の戦場か自分の魔力ゾーンにあるなら「戦場のハイケイ1つを破壊する」を発揮してもよい。","legacyText":"冥府発動","imageUrl":"https://one-draw.jp/ijinden/cardlist/004/card/04_061.png","expansion":45,"rarity":1,"type":3,"level":1,"color":64,"term":48,"trait":0,"legacy":2,"orderTable":370,"orderDeck":287},</text:p>
          </table:table-cell>
          <table:table-cell table:number-columns-repeated="16347"/>
        </table:table-row>
        <table:table-row table:style-name="ro2">
          <table:table-cell office:value-type="float" office:value="371" calcext:value-type="float">
            <text:p>371</text:p>
          </table:table-cell>
          <table:table-cell office:value-type="float" office:value="288" calcext:value-type="float">
            <text:p>288</text:p>
          </table:table-cell>
          <table:table-cell office:value-type="string" calcext:value-type="string">
            <text:p>4-62</text:p>
          </table:table-cell>
          <table:table-cell office:value-type="float" office:value="62" calcext:value-type="float">
            <text:p>62</text:p>
          </table:table-cell>
          <table:table-cell office:value-type="string" calcext:value-type="string">
            <text:p>ソリッドビジョンδ</text:p>
          </table:table-cell>
          <table:table-cell office:value-type="string" calcext:value-type="string">
            <text:p>そりっどびじょんでるた</text:p>
          </table:table-cell>
          <table:table-cell office:value-type="string" calcext:value-type="string">
            <text:p>第４弾ブースターパック</text:p>
          </table:table-cell>
          <table:table-cell table:formula="of:=VLOOKUP([.G371];[$収録番号.$A$1:$収録番号.$B$9];2;0)" office:value-type="float" office:value="45" calcext:value-type="float">
            <text:p>45</text:p>
          </table:table-cell>
          <table:table-cell office:value-type="string" calcext:value-type="string">
            <text:p>N</text:p>
          </table:table-cell>
          <table:table-cell table:formula="of:=VLOOKUP([.I371];[$レアリティ番号.$A$1:$レアリティ番号.$B$4];2;0)" office:value-type="float" office:value="1" calcext:value-type="float">
            <text:p>1</text:p>
          </table:table-cell>
          <table:table-cell office:value-type="string" calcext:value-type="string">
            <text:p>マホウ</text:p>
          </table:table-cell>
          <table:table-cell table:formula="of:=VLOOKUP([.K371];[$種類番号.$A$1:$種類番号.$B$4];2;0)" office:value-type="float" office:value="3" calcext:value-type="float">
            <text:p>3</text:p>
          </table:table-cell>
          <table:table-cell office:value-type="string" calcext:value-type="string">
            <text:p>無色</text:p>
          </table:table-cell>
          <table:table-cell table:formula="of:=VLOOKUP([.M371];[$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青魔導</text:p>
          </table:table-cell>
          <table:table-cell table:formula="of:=IFERROR(VLOOKUP([.$Q371];[$能力語番号.$A$1:$能力語番号.$B$10];2;0);0)" office:value-type="float" office:value="80" calcext:value-type="float">
            <text:p>80</text:p>
          </table:table-cell>
          <table:table-cell table:formula="of:=NA()" office:value-type="string" office:string-value="" calcext:value-type="error">
            <text:p>#N/A</text:p>
          </table:table-cell>
          <table:table-cell table:formula="of:=IFERROR(VLOOKUP([.$S371];[$特性番号.$A$1:$特性番号.$B$8];2;0);0)" office:value-type="float" office:value="0" calcext:value-type="float">
            <text:p>0</text:p>
          </table:table-cell>
          <table:table-cell office:value-type="string" calcext:value-type="string">
            <text:p>1ドローする。¶青魔導 - 青のカードが自分の戦場か自分の魔力ゾーンにあるなら「1ドローして、自分の手札の他のカード2つを墓地に置く」を発揮してもよい。</text:p>
          </table:table-cell>
          <table:table-cell table:style-name="ce8" office:value-type="string" calcext:value-type="string">
            <text:p>冥府発動</text:p>
          </table:table-cell>
          <table:table-cell table:formula="of:=IFERROR(VLOOKUP([.$V371];[$遺業能力番号.$A$1:$遺業能力番号.$B$9];2;0);0)" office:value-type="float" office:value="2" calcext:value-type="float">
            <text:p>2</text:p>
          </table:table-cell>
          <table:table-cell office:value-type="string" calcext:value-type="string">
            <text:p>https://one-draw.jp/ijinden/cardlist/004/card/04_062.png</text:p>
          </table:table-cell>
          <table:table-cell table:formula="of:=CONCATENATE([$JSON.$A$1];[.$C371];[$JSON.$B$1];[.$E371];[$JSON.$C$1];[.$F371];[$JSON.$D$1];IF(ISNA([.$S371]);&quot;null&quot;;&quot;&quot;&quot;&quot;&amp;[.$S371]&amp;&quot;&quot;&quot;&quot;);[$JSON.$E$1];[.$U371];[$JSON.$F$1];IF(ISNA([.$V371]);&quot;null&quot;;&quot;&quot;&quot;&quot;&amp;[.$V371]&amp;&quot;&quot;&quot;&quot;);[$JSON.$G$1];[.$X371];[$JSON.$H$1];[.$H371];[$JSON.$I$1];[.J371];[$JSON.$J$1];[.$L371];[$JSON.$K$1];[.$O371];[$JSON.$L$1];[.$N371];[$JSON.$M$1];[.$R371];[$JSON.$N$1];[.$T371];[$JSON.$O$1];[.$W371];[$JSON.$P$1];[.$A371];[$JSON.$Q$1];[.$B371];[$JSON.$R$1])" office:value-type="string" office:string-value="{&quot;id&quot;:&quot;4-62&quot;,&quot;name&quot;:&quot;ソリッドビジョンδ&quot;,&quot;kana&quot;:&quot;そりっどびじょんでるた&quot;,&quot;traitText&quot;:null,&quot;ruleText&quot;:&quot;1ドローする。¶青魔導 - 青のカードが自分の戦場か自分の魔力ゾーンにあるなら「1ドローして、自分の手札の他のカード2つを墓地に置く」を発揮してもよい。&quot;,&quot;legacyText&quot;:&quot;冥府発動&quot;,&quot;imageUrl&quot;:&quot;https://one-draw.jp/ijinden/cardlist/004/card/04_062.png&quot;,&quot;expansion&quot;:45,&quot;rarity&quot;:1,&quot;type&quot;:3,&quot;level&quot;:1,&quot;color&quot;:64,&quot;term&quot;:80,&quot;trait&quot;:0,&quot;legacy&quot;:2,&quot;orderTable&quot;:371,&quot;orderDeck&quot;:288}," calcext:value-type="string">
            <text:p>{"id":"4-62","name":"ソリッドビジョンδ","kana":"そりっどびじょんでるた","traitText":null,"ruleText":"1ドローする。¶青魔導 - 青のカードが自分の戦場か自分の魔力ゾーンにあるなら「1ドローして、自分の手札の他のカード2つを墓地に置く」を発揮してもよい。","legacyText":"冥府発動","imageUrl":"https://one-draw.jp/ijinden/cardlist/004/card/04_062.png","expansion":45,"rarity":1,"type":3,"level":1,"color":64,"term":80,"trait":0,"legacy":2,"orderTable":371,"orderDeck":288},</text:p>
          </table:table-cell>
          <table:table-cell table:number-columns-repeated="16347"/>
        </table:table-row>
        <table:table-row table:style-name="ro2">
          <table:table-cell office:value-type="float" office:value="372" calcext:value-type="float">
            <text:p>372</text:p>
          </table:table-cell>
          <table:table-cell office:value-type="float" office:value="289" calcext:value-type="float">
            <text:p>289</text:p>
          </table:table-cell>
          <table:table-cell office:value-type="string" calcext:value-type="string">
            <text:p>4-63</text:p>
          </table:table-cell>
          <table:table-cell office:value-type="float" office:value="63" calcext:value-type="float">
            <text:p>63</text:p>
          </table:table-cell>
          <table:table-cell office:value-type="string" calcext:value-type="string">
            <text:p>ソリッドビジョンΩ</text:p>
          </table:table-cell>
          <table:table-cell office:value-type="string" calcext:value-type="string">
            <text:p>そりっどびじょんおめが</text:p>
          </table:table-cell>
          <table:table-cell office:value-type="string" calcext:value-type="string">
            <text:p>第４弾ブースターパック</text:p>
          </table:table-cell>
          <table:table-cell table:formula="of:=VLOOKUP([.G372];[$収録番号.$A$1:$収録番号.$B$9];2;0)" office:value-type="float" office:value="45" calcext:value-type="float">
            <text:p>45</text:p>
          </table:table-cell>
          <table:table-cell office:value-type="string" calcext:value-type="string">
            <text:p>N</text:p>
          </table:table-cell>
          <table:table-cell table:formula="of:=VLOOKUP([.I372];[$レアリティ番号.$A$1:$レアリティ番号.$B$4];2;0)" office:value-type="float" office:value="1" calcext:value-type="float">
            <text:p>1</text:p>
          </table:table-cell>
          <table:table-cell office:value-type="string" calcext:value-type="string">
            <text:p>マホウ</text:p>
          </table:table-cell>
          <table:table-cell table:formula="of:=VLOOKUP([.K372];[$種類番号.$A$1:$種類番号.$B$4];2;0)" office:value-type="float" office:value="3" calcext:value-type="float">
            <text:p>3</text:p>
          </table:table-cell>
          <table:table-cell office:value-type="string" calcext:value-type="string">
            <text:p>無色</text:p>
          </table:table-cell>
          <table:table-cell table:formula="of:=VLOOKUP([.M372];[$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緑魔導</text:p>
          </table:table-cell>
          <table:table-cell table:formula="of:=IFERROR(VLOOKUP([.$Q372];[$能力語番号.$A$1:$能力語番号.$B$10];2;0);0)" office:value-type="float" office:value="144" calcext:value-type="float">
            <text:p>144</text:p>
          </table:table-cell>
          <table:table-cell table:formula="of:=NA()" office:value-type="string" office:string-value="" calcext:value-type="error">
            <text:p>#N/A</text:p>
          </table:table-cell>
          <table:table-cell table:formula="of:=IFERROR(VLOOKUP([.$S372];[$特性番号.$A$1:$特性番号.$B$8];2;0);0)" office:value-type="float" office:value="0" calcext:value-type="float">
            <text:p>0</text:p>
          </table:table-cell>
          <table:table-cell office:value-type="string" calcext:value-type="string">
            <text:p>1ドローする。¶緑魔導 - 緑のカードが自分の戦場か自分の魔力ゾーンにあるなら「これを裏にして魔力ゾーンに置く」を発揮してもよい。</text:p>
          </table:table-cell>
          <table:table-cell table:style-name="ce8" office:value-type="string" calcext:value-type="string">
            <text:p>冥府発動</text:p>
          </table:table-cell>
          <table:table-cell table:formula="of:=IFERROR(VLOOKUP([.$V372];[$遺業能力番号.$A$1:$遺業能力番号.$B$9];2;0);0)" office:value-type="float" office:value="2" calcext:value-type="float">
            <text:p>2</text:p>
          </table:table-cell>
          <table:table-cell office:value-type="string" calcext:value-type="string">
            <text:p>https://one-draw.jp/ijinden/cardlist/004/card/04_063.png</text:p>
          </table:table-cell>
          <table:table-cell table:formula="of:=CONCATENATE([$JSON.$A$1];[.$C372];[$JSON.$B$1];[.$E372];[$JSON.$C$1];[.$F372];[$JSON.$D$1];IF(ISNA([.$S372]);&quot;null&quot;;&quot;&quot;&quot;&quot;&amp;[.$S372]&amp;&quot;&quot;&quot;&quot;);[$JSON.$E$1];[.$U372];[$JSON.$F$1];IF(ISNA([.$V372]);&quot;null&quot;;&quot;&quot;&quot;&quot;&amp;[.$V372]&amp;&quot;&quot;&quot;&quot;);[$JSON.$G$1];[.$X372];[$JSON.$H$1];[.$H372];[$JSON.$I$1];[.J372];[$JSON.$J$1];[.$L372];[$JSON.$K$1];[.$O372];[$JSON.$L$1];[.$N372];[$JSON.$M$1];[.$R372];[$JSON.$N$1];[.$T372];[$JSON.$O$1];[.$W372];[$JSON.$P$1];[.$A372];[$JSON.$Q$1];[.$B372];[$JSON.$R$1])" office:value-type="string" office:string-value="{&quot;id&quot;:&quot;4-63&quot;,&quot;name&quot;:&quot;ソリッドビジョンΩ&quot;,&quot;kana&quot;:&quot;そりっどびじょんおめが&quot;,&quot;traitText&quot;:null,&quot;ruleText&quot;:&quot;1ドローする。¶緑魔導 - 緑のカードが自分の戦場か自分の魔力ゾーンにあるなら「これを裏にして魔力ゾーンに置く」を発揮してもよい。&quot;,&quot;legacyText&quot;:&quot;冥府発動&quot;,&quot;imageUrl&quot;:&quot;https://one-draw.jp/ijinden/cardlist/004/card/04_063.png&quot;,&quot;expansion&quot;:45,&quot;rarity&quot;:1,&quot;type&quot;:3,&quot;level&quot;:1,&quot;color&quot;:64,&quot;term&quot;:144,&quot;trait&quot;:0,&quot;legacy&quot;:2,&quot;orderTable&quot;:372,&quot;orderDeck&quot;:289}," calcext:value-type="string">
            <text:p>{"id":"4-63","name":"ソリッドビジョンΩ","kana":"そりっどびじょんおめが","traitText":null,"ruleText":"1ドローする。¶緑魔導 - 緑のカードが自分の戦場か自分の魔力ゾーンにあるなら「これを裏にして魔力ゾーンに置く」を発揮してもよい。","legacyText":"冥府発動","imageUrl":"https://one-draw.jp/ijinden/cardlist/004/card/04_063.png","expansion":45,"rarity":1,"type":3,"level":1,"color":64,"term":144,"trait":0,"legacy":2,"orderTable":372,"orderDeck":289},</text:p>
          </table:table-cell>
          <table:table-cell table:number-columns-repeated="16347"/>
        </table:table-row>
        <table:table-row table:style-name="ro2">
          <table:table-cell office:value-type="float" office:value="373" calcext:value-type="float">
            <text:p>373</text:p>
          </table:table-cell>
          <table:table-cell office:value-type="float" office:value="290" calcext:value-type="float">
            <text:p>290</text:p>
          </table:table-cell>
          <table:table-cell office:value-type="string" calcext:value-type="string">
            <text:p>4-64</text:p>
          </table:table-cell>
          <table:table-cell office:value-type="float" office:value="64" calcext:value-type="float">
            <text:p>64</text:p>
          </table:table-cell>
          <table:table-cell office:value-type="string" calcext:value-type="string">
            <text:p>ソリッドビジョンβ</text:p>
          </table:table-cell>
          <table:table-cell office:value-type="string" calcext:value-type="string">
            <text:p>そりっどびじょんべーた</text:p>
          </table:table-cell>
          <table:table-cell office:value-type="string" calcext:value-type="string">
            <text:p>第４弾ブースターパック</text:p>
          </table:table-cell>
          <table:table-cell table:formula="of:=VLOOKUP([.G373];[$収録番号.$A$1:$収録番号.$B$9];2;0)" office:value-type="float" office:value="45" calcext:value-type="float">
            <text:p>45</text:p>
          </table:table-cell>
          <table:table-cell office:value-type="string" calcext:value-type="string">
            <text:p>N</text:p>
          </table:table-cell>
          <table:table-cell table:formula="of:=VLOOKUP([.I373];[$レアリティ番号.$A$1:$レアリティ番号.$B$4];2;0)" office:value-type="float" office:value="1" calcext:value-type="float">
            <text:p>1</text:p>
          </table:table-cell>
          <table:table-cell office:value-type="string" calcext:value-type="string">
            <text:p>マホウ</text:p>
          </table:table-cell>
          <table:table-cell table:formula="of:=VLOOKUP([.K373];[$種類番号.$A$1:$種類番号.$B$4];2;0)" office:value-type="float" office:value="3" calcext:value-type="float">
            <text:p>3</text:p>
          </table:table-cell>
          <table:table-cell office:value-type="string" calcext:value-type="string">
            <text:p>無色</text:p>
          </table:table-cell>
          <table:table-cell table:formula="of:=VLOOKUP([.M373];[$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黄魔導</text:p>
          </table:table-cell>
          <table:table-cell table:formula="of:=IFERROR(VLOOKUP([.$Q373];[$能力語番号.$A$1:$能力語番号.$B$10];2;0);0)" office:value-type="float" office:value="272" calcext:value-type="float">
            <text:p>272</text:p>
          </table:table-cell>
          <table:table-cell table:formula="of:=NA()" office:value-type="string" office:string-value="" calcext:value-type="error">
            <text:p>#N/A</text:p>
          </table:table-cell>
          <table:table-cell table:formula="of:=IFERROR(VLOOKUP([.$S373];[$特性番号.$A$1:$特性番号.$B$8];2;0);0)" office:value-type="float" office:value="0" calcext:value-type="float">
            <text:p>0</text:p>
          </table:table-cell>
          <table:table-cell office:value-type="string" calcext:value-type="string">
            <text:p>1ドローする。¶黄魔導 - 黄のカードが自分の戦場か自分の魔力ゾーンにあるなら「墓地のマリョクでないカード1つを山札の上か下に戻す」を発揮してもよい。</text:p>
          </table:table-cell>
          <table:table-cell table:style-name="ce8" office:value-type="string" calcext:value-type="string">
            <text:p>冥府発動</text:p>
          </table:table-cell>
          <table:table-cell table:formula="of:=IFERROR(VLOOKUP([.$V373];[$遺業能力番号.$A$1:$遺業能力番号.$B$9];2;0);0)" office:value-type="float" office:value="2" calcext:value-type="float">
            <text:p>2</text:p>
          </table:table-cell>
          <table:table-cell office:value-type="string" calcext:value-type="string">
            <text:p>https://one-draw.jp/ijinden/cardlist/004/card/04_064.png</text:p>
          </table:table-cell>
          <table:table-cell table:formula="of:=CONCATENATE([$JSON.$A$1];[.$C373];[$JSON.$B$1];[.$E373];[$JSON.$C$1];[.$F373];[$JSON.$D$1];IF(ISNA([.$S373]);&quot;null&quot;;&quot;&quot;&quot;&quot;&amp;[.$S373]&amp;&quot;&quot;&quot;&quot;);[$JSON.$E$1];[.$U373];[$JSON.$F$1];IF(ISNA([.$V373]);&quot;null&quot;;&quot;&quot;&quot;&quot;&amp;[.$V373]&amp;&quot;&quot;&quot;&quot;);[$JSON.$G$1];[.$X373];[$JSON.$H$1];[.$H373];[$JSON.$I$1];[.J373];[$JSON.$J$1];[.$L373];[$JSON.$K$1];[.$O373];[$JSON.$L$1];[.$N373];[$JSON.$M$1];[.$R373];[$JSON.$N$1];[.$T373];[$JSON.$O$1];[.$W373];[$JSON.$P$1];[.$A373];[$JSON.$Q$1];[.$B373];[$JSON.$R$1])" office:value-type="string" office:string-value="{&quot;id&quot;:&quot;4-64&quot;,&quot;name&quot;:&quot;ソリッドビジョンβ&quot;,&quot;kana&quot;:&quot;そりっどびじょんべーた&quot;,&quot;traitText&quot;:null,&quot;ruleText&quot;:&quot;1ドローする。¶黄魔導 - 黄のカードが自分の戦場か自分の魔力ゾーンにあるなら「墓地のマリョクでないカード1つを山札の上か下に戻す」を発揮してもよい。&quot;,&quot;legacyText&quot;:&quot;冥府発動&quot;,&quot;imageUrl&quot;:&quot;https://one-draw.jp/ijinden/cardlist/004/card/04_064.png&quot;,&quot;expansion&quot;:45,&quot;rarity&quot;:1,&quot;type&quot;:3,&quot;level&quot;:1,&quot;color&quot;:64,&quot;term&quot;:272,&quot;trait&quot;:0,&quot;legacy&quot;:2,&quot;orderTable&quot;:373,&quot;orderDeck&quot;:290}," calcext:value-type="string">
            <text:p>{"id":"4-64","name":"ソリッドビジョンβ","kana":"そりっどびじょんべーた","traitText":null,"ruleText":"1ドローする。¶黄魔導 - 黄のカードが自分の戦場か自分の魔力ゾーンにあるなら「墓地のマリョクでないカード1つを山札の上か下に戻す」を発揮してもよい。","legacyText":"冥府発動","imageUrl":"https://one-draw.jp/ijinden/cardlist/004/card/04_064.png","expansion":45,"rarity":1,"type":3,"level":1,"color":64,"term":272,"trait":0,"legacy":2,"orderTable":373,"orderDeck":290},</text:p>
          </table:table-cell>
          <table:table-cell table:number-columns-repeated="16347"/>
        </table:table-row>
        <table:table-row table:style-name="ro2">
          <table:table-cell office:value-type="float" office:value="374" calcext:value-type="float">
            <text:p>374</text:p>
          </table:table-cell>
          <table:table-cell office:value-type="float" office:value="291" calcext:value-type="float">
            <text:p>291</text:p>
          </table:table-cell>
          <table:table-cell office:value-type="string" calcext:value-type="string">
            <text:p>4-65</text:p>
          </table:table-cell>
          <table:table-cell office:value-type="float" office:value="65" calcext:value-type="float">
            <text:p>65</text:p>
          </table:table-cell>
          <table:table-cell office:value-type="string" calcext:value-type="string">
            <text:p>ソリッドビジョンγ</text:p>
          </table:table-cell>
          <table:table-cell office:value-type="string" calcext:value-type="string">
            <text:p>そりっどびじょんがんま</text:p>
          </table:table-cell>
          <table:table-cell office:value-type="string" calcext:value-type="string">
            <text:p>第４弾ブースターパック</text:p>
          </table:table-cell>
          <table:table-cell table:formula="of:=VLOOKUP([.G374];[$収録番号.$A$1:$収録番号.$B$9];2;0)" office:value-type="float" office:value="45" calcext:value-type="float">
            <text:p>45</text:p>
          </table:table-cell>
          <table:table-cell office:value-type="string" calcext:value-type="string">
            <text:p>N</text:p>
          </table:table-cell>
          <table:table-cell table:formula="of:=VLOOKUP([.I374];[$レアリティ番号.$A$1:$レアリティ番号.$B$4];2;0)" office:value-type="float" office:value="1" calcext:value-type="float">
            <text:p>1</text:p>
          </table:table-cell>
          <table:table-cell office:value-type="string" calcext:value-type="string">
            <text:p>マホウ</text:p>
          </table:table-cell>
          <table:table-cell table:formula="of:=VLOOKUP([.K374];[$種類番号.$A$1:$種類番号.$B$4];2;0)" office:value-type="float" office:value="3" calcext:value-type="float">
            <text:p>3</text:p>
          </table:table-cell>
          <table:table-cell office:value-type="string" calcext:value-type="string">
            <text:p>無色</text:p>
          </table:table-cell>
          <table:table-cell table:formula="of:=VLOOKUP([.M374];[$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紫魔導</text:p>
          </table:table-cell>
          <table:table-cell table:formula="of:=IFERROR(VLOOKUP([.$Q374];[$能力語番号.$A$1:$能力語番号.$B$10];2;0);0)" office:value-type="float" office:value="528" calcext:value-type="float">
            <text:p>528</text:p>
          </table:table-cell>
          <table:table-cell table:formula="of:=NA()" office:value-type="string" office:string-value="" calcext:value-type="error">
            <text:p>#N/A</text:p>
          </table:table-cell>
          <table:table-cell table:formula="of:=IFERROR(VLOOKUP([.$S374];[$特性番号.$A$1:$特性番号.$B$8];2;0);0)" office:value-type="float" office:value="0" calcext:value-type="float">
            <text:p>0</text:p>
          </table:table-cell>
          <table:table-cell office:value-type="string" calcext:value-type="string">
            <text:p>1ドローする。¶紫魔導 - 紫のカードが自分の戦場か自分の魔力ゾーンにあるなら「自分の戦場のガーディアン1体を手札に戻す」を発揮してもよい。</text:p>
          </table:table-cell>
          <table:table-cell table:style-name="ce8" office:value-type="string" calcext:value-type="string">
            <text:p>冥府発動</text:p>
          </table:table-cell>
          <table:table-cell table:formula="of:=IFERROR(VLOOKUP([.$V374];[$遺業能力番号.$A$1:$遺業能力番号.$B$9];2;0);0)" office:value-type="float" office:value="2" calcext:value-type="float">
            <text:p>2</text:p>
          </table:table-cell>
          <table:table-cell office:value-type="string" calcext:value-type="string">
            <text:p>https://one-draw.jp/ijinden/cardlist/004/card/04_065.png</text:p>
          </table:table-cell>
          <table:table-cell table:formula="of:=CONCATENATE([$JSON.$A$1];[.$C374];[$JSON.$B$1];[.$E374];[$JSON.$C$1];[.$F374];[$JSON.$D$1];IF(ISNA([.$S374]);&quot;null&quot;;&quot;&quot;&quot;&quot;&amp;[.$S374]&amp;&quot;&quot;&quot;&quot;);[$JSON.$E$1];[.$U374];[$JSON.$F$1];IF(ISNA([.$V374]);&quot;null&quot;;&quot;&quot;&quot;&quot;&amp;[.$V374]&amp;&quot;&quot;&quot;&quot;);[$JSON.$G$1];[.$X374];[$JSON.$H$1];[.$H374];[$JSON.$I$1];[.J374];[$JSON.$J$1];[.$L374];[$JSON.$K$1];[.$O374];[$JSON.$L$1];[.$N374];[$JSON.$M$1];[.$R374];[$JSON.$N$1];[.$T374];[$JSON.$O$1];[.$W374];[$JSON.$P$1];[.$A374];[$JSON.$Q$1];[.$B374];[$JSON.$R$1])" office:value-type="string" office:string-value="{&quot;id&quot;:&quot;4-65&quot;,&quot;name&quot;:&quot;ソリッドビジョンγ&quot;,&quot;kana&quot;:&quot;そりっどびじょんがんま&quot;,&quot;traitText&quot;:null,&quot;ruleText&quot;:&quot;1ドローする。¶紫魔導 - 紫のカードが自分の戦場か自分の魔力ゾーンにあるなら「自分の戦場のガーディアン1体を手札に戻す」を発揮してもよい。&quot;,&quot;legacyText&quot;:&quot;冥府発動&quot;,&quot;imageUrl&quot;:&quot;https://one-draw.jp/ijinden/cardlist/004/card/04_065.png&quot;,&quot;expansion&quot;:45,&quot;rarity&quot;:1,&quot;type&quot;:3,&quot;level&quot;:1,&quot;color&quot;:64,&quot;term&quot;:528,&quot;trait&quot;:0,&quot;legacy&quot;:2,&quot;orderTable&quot;:374,&quot;orderDeck&quot;:291}," calcext:value-type="string">
            <text:p>{"id":"4-65","name":"ソリッドビジョンγ","kana":"そりっどびじょんがんま","traitText":null,"ruleText":"1ドローする。¶紫魔導 - 紫のカードが自分の戦場か自分の魔力ゾーンにあるなら「自分の戦場のガーディアン1体を手札に戻す」を発揮してもよい。","legacyText":"冥府発動","imageUrl":"https://one-draw.jp/ijinden/cardlist/004/card/04_065.png","expansion":45,"rarity":1,"type":3,"level":1,"color":64,"term":528,"trait":0,"legacy":2,"orderTable":374,"orderDeck":291},</text:p>
          </table:table-cell>
          <table:table-cell table:number-columns-repeated="16347"/>
        </table:table-row>
        <table:table-row table:style-name="ro2">
          <table:table-cell office:value-type="float" office:value="375" calcext:value-type="float">
            <text:p>375</text:p>
          </table:table-cell>
          <table:table-cell office:value-type="float" office:value="348" calcext:value-type="float">
            <text:p>348</text:p>
          </table:table-cell>
          <table:table-cell office:value-type="string" calcext:value-type="string">
            <text:p>4-66</text:p>
          </table:table-cell>
          <table:table-cell office:value-type="float" office:value="66" calcext:value-type="float">
            <text:p>66</text:p>
          </table:table-cell>
          <table:table-cell office:value-type="string" calcext:value-type="string">
            <text:p>遁甲式烈火</text:p>
          </table:table-cell>
          <table:table-cell office:value-type="string" calcext:value-type="string">
            <text:p>とんこうしきれっか</text:p>
          </table:table-cell>
          <table:table-cell office:value-type="string" calcext:value-type="string">
            <text:p>第４弾ブースターパック</text:p>
          </table:table-cell>
          <table:table-cell table:formula="of:=VLOOKUP([.G375];[$収録番号.$A$1:$収録番号.$B$9];2;0)" office:value-type="float" office:value="45" calcext:value-type="float">
            <text:p>45</text:p>
          </table:table-cell>
          <table:table-cell office:value-type="string" calcext:value-type="string">
            <text:p>R</text:p>
          </table:table-cell>
          <table:table-cell table:formula="of:=VLOOKUP([.I375];[$レアリティ番号.$A$1:$レアリティ番号.$B$4];2;0)" office:value-type="float" office:value="2" calcext:value-type="float">
            <text:p>2</text:p>
          </table:table-cell>
          <table:table-cell office:value-type="string" calcext:value-type="string">
            <text:p>マリョク</text:p>
          </table:table-cell>
          <table:table-cell table:formula="of:=VLOOKUP([.K375];[$種類番号.$A$1:$種類番号.$B$4];2;0)" office:value-type="float" office:value="4" calcext:value-type="float">
            <text:p>4</text:p>
          </table:table-cell>
          <table:table-cell office:value-type="string" calcext:value-type="string">
            <text:p>赤</text:p>
          </table:table-cell>
          <table:table-cell table:formula="of:=VLOOKUP([.M375];[$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7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75];[$特性番号.$A$1:$特性番号.$B$8];2;0);0)" office:value-type="float" office:value="0" calcext:value-type="float">
            <text:p>0</text:p>
          </table:table-cell>
          <table:table-cell office:value-type="string" calcext:value-type="string">
            <text:p>相手のターンのブロックステップが開始したとき、魔力ゾーンのこれを表にして発動できる。自分の戦場のガーディアン1体を山札の上に戻して、相手の戦場の起きているイジンすべてを破壊する。</text:p>
          </table:table-cell>
          <table:table-cell table:style-name="ce8" office:value-type="string" calcext:value-type="string">
            <text:p>喪神</text:p>
          </table:table-cell>
          <table:table-cell table:formula="of:=IFERROR(VLOOKUP([.$V375];[$遺業能力番号.$A$1:$遺業能力番号.$B$9];2;0);0)" office:value-type="float" office:value="9" calcext:value-type="float">
            <text:p>9</text:p>
          </table:table-cell>
          <table:table-cell office:value-type="string" calcext:value-type="string">
            <text:p>https://one-draw.jp/ijinden/cardlist/004/card/04_066.png</text:p>
          </table:table-cell>
          <table:table-cell table:formula="of:=CONCATENATE([$JSON.$A$1];[.$C375];[$JSON.$B$1];[.$E375];[$JSON.$C$1];[.$F375];[$JSON.$D$1];IF(ISNA([.$S375]);&quot;null&quot;;&quot;&quot;&quot;&quot;&amp;[.$S375]&amp;&quot;&quot;&quot;&quot;);[$JSON.$E$1];[.$U375];[$JSON.$F$1];IF(ISNA([.$V375]);&quot;null&quot;;&quot;&quot;&quot;&quot;&amp;[.$V375]&amp;&quot;&quot;&quot;&quot;);[$JSON.$G$1];[.$X375];[$JSON.$H$1];[.$H375];[$JSON.$I$1];[.J375];[$JSON.$J$1];[.$L375];[$JSON.$K$1];[.$O375];[$JSON.$L$1];[.$N375];[$JSON.$M$1];[.$R375];[$JSON.$N$1];[.$T375];[$JSON.$O$1];[.$W375];[$JSON.$P$1];[.$A375];[$JSON.$Q$1];[.$B375];[$JSON.$R$1])" office:value-type="string" office:string-value="{&quot;id&quot;:&quot;4-66&quot;,&quot;name&quot;:&quot;遁甲式烈火&quot;,&quot;kana&quot;:&quot;とんこうしきれっか&quot;,&quot;traitText&quot;:null,&quot;ruleText&quot;:&quot;相手のターンのブロックステップが開始したとき、魔力ゾーンのこれを表にして発動できる。自分の戦場のガーディアン1体を山札の上に戻して、相手の戦場の起きているイジンすべてを破壊する。&quot;,&quot;legacyText&quot;:&quot;喪神&quot;,&quot;imageUrl&quot;:&quot;https://one-draw.jp/ijinden/cardlist/004/card/04_066.png&quot;,&quot;expansion&quot;:45,&quot;rarity&quot;:2,&quot;type&quot;:4,&quot;level&quot;:1,&quot;color&quot;:1,&quot;term&quot;:0,&quot;trait&quot;:0,&quot;legacy&quot;:9,&quot;orderTable&quot;:375,&quot;orderDeck&quot;:348}," calcext:value-type="string">
            <text:p>{"id":"4-66","name":"遁甲式烈火","kana":"とんこうしきれっか","traitText":null,"ruleText":"相手のターンのブロックステップが開始したとき、魔力ゾーンのこれを表にして発動できる。自分の戦場のガーディアン1体を山札の上に戻して、相手の戦場の起きているイジンすべてを破壊する。","legacyText":"喪神","imageUrl":"https://one-draw.jp/ijinden/cardlist/004/card/04_066.png","expansion":45,"rarity":2,"type":4,"level":1,"color":1,"term":0,"trait":0,"legacy":9,"orderTable":375,"orderDeck":348},</text:p>
          </table:table-cell>
          <table:table-cell table:number-columns-repeated="16347"/>
        </table:table-row>
        <table:table-row table:style-name="ro2">
          <table:table-cell office:value-type="float" office:value="376" calcext:value-type="float">
            <text:p>376</text:p>
          </table:table-cell>
          <table:table-cell office:value-type="float" office:value="337" calcext:value-type="float">
            <text:p>337</text:p>
          </table:table-cell>
          <table:table-cell office:value-type="string" calcext:value-type="string">
            <text:p>4-67</text:p>
          </table:table-cell>
          <table:table-cell office:value-type="float" office:value="67" calcext:value-type="float">
            <text:p>67</text:p>
          </table:table-cell>
          <table:table-cell office:value-type="string" calcext:value-type="string">
            <text:p>レッドサークル</text:p>
          </table:table-cell>
          <table:table-cell office:value-type="string" calcext:value-type="string">
            <text:p>れっどさーくる</text:p>
          </table:table-cell>
          <table:table-cell office:value-type="string" calcext:value-type="string">
            <text:p>第４弾ブースターパック</text:p>
          </table:table-cell>
          <table:table-cell table:formula="of:=VLOOKUP([.G376];[$収録番号.$A$1:$収録番号.$B$9];2;0)" office:value-type="float" office:value="45" calcext:value-type="float">
            <text:p>45</text:p>
          </table:table-cell>
          <table:table-cell office:value-type="string" calcext:value-type="string">
            <text:p>N</text:p>
          </table:table-cell>
          <table:table-cell table:formula="of:=VLOOKUP([.I376];[$レアリティ番号.$A$1:$レアリティ番号.$B$4];2;0)" office:value-type="float" office:value="1" calcext:value-type="float">
            <text:p>1</text:p>
          </table:table-cell>
          <table:table-cell office:value-type="string" calcext:value-type="string">
            <text:p>マリョク</text:p>
          </table:table-cell>
          <table:table-cell table:formula="of:=VLOOKUP([.K376];[$種類番号.$A$1:$種類番号.$B$4];2;0)" office:value-type="float" office:value="4" calcext:value-type="float">
            <text:p>4</text:p>
          </table:table-cell>
          <table:table-cell office:value-type="string" calcext:value-type="string">
            <text:p>赤</text:p>
          </table:table-cell>
          <table:table-cell table:formula="of:=VLOOKUP([.M376];[$色番号.$A$1:$色番号.$B$10];2;0)" office:value-type="float" office:value="1" calcext:value-type="float">
            <text:p>1</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7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76];[$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V376];[$遺業能力番号.$A$1:$遺業能力番号.$B$9];2;0);0)" office:value-type="float" office:value="5" calcext:value-type="float">
            <text:p>5</text:p>
          </table:table-cell>
          <table:table-cell office:value-type="string" calcext:value-type="string">
            <text:p>https://one-draw.jp/ijinden/cardlist/004/card/04_067.png</text:p>
          </table:table-cell>
          <table:table-cell table:formula="of:=CONCATENATE([$JSON.$A$1];[.$C376];[$JSON.$B$1];[.$E376];[$JSON.$C$1];[.$F376];[$JSON.$D$1];IF(ISNA([.$S376]);&quot;null&quot;;&quot;&quot;&quot;&quot;&amp;[.$S376]&amp;&quot;&quot;&quot;&quot;);[$JSON.$E$1];[.$U376];[$JSON.$F$1];IF(ISNA([.$V376]);&quot;null&quot;;&quot;&quot;&quot;&quot;&amp;[.$V376]&amp;&quot;&quot;&quot;&quot;);[$JSON.$G$1];[.$X376];[$JSON.$H$1];[.$H376];[$JSON.$I$1];[.J376];[$JSON.$J$1];[.$L376];[$JSON.$K$1];[.$O376];[$JSON.$L$1];[.$N376];[$JSON.$M$1];[.$R376];[$JSON.$N$1];[.$T376];[$JSON.$O$1];[.$W376];[$JSON.$P$1];[.$A376];[$JSON.$Q$1];[.$B376];[$JSON.$R$1])" office:value-type="string" office:string-value="{&quot;id&quot;:&quot;4-67&quot;,&quot;name&quot;:&quot;レッドサークル&quot;,&quot;kana&quot;:&quot;れっど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67.png&quot;,&quot;expansion&quot;:45,&quot;rarity&quot;:1,&quot;type&quot;:4,&quot;level&quot;:0,&quot;color&quot;:1,&quot;term&quot;:0,&quot;trait&quot;:0,&quot;legacy&quot;:5,&quot;orderTable&quot;:376,&quot;orderDeck&quot;:337}," calcext:value-type="string">
            <text:p>{"id":"4-67","name":"レッドサークル","kana":"れっどさーくる","traitText":null,"ruleText":"自分がイジン召喚する際、そのイジンのレベルは3だけ下がる。¶イジンが自分の戦場に置かれたとき、これを裏にする。","legacyText":"手札に戻す","imageUrl":"https://one-draw.jp/ijinden/cardlist/004/card/04_067.png","expansion":45,"rarity":1,"type":4,"level":0,"color":1,"term":0,"trait":0,"legacy":5,"orderTable":376,"orderDeck":337},</text:p>
          </table:table-cell>
          <table:table-cell table:number-columns-repeated="16347"/>
        </table:table-row>
        <table:table-row table:style-name="ro2">
          <table:table-cell office:value-type="float" office:value="377" calcext:value-type="float">
            <text:p>377</text:p>
          </table:table-cell>
          <table:table-cell office:value-type="float" office:value="354" calcext:value-type="float">
            <text:p>354</text:p>
          </table:table-cell>
          <table:table-cell office:value-type="string" calcext:value-type="string">
            <text:p>4-68</text:p>
          </table:table-cell>
          <table:table-cell office:value-type="float" office:value="68" calcext:value-type="float">
            <text:p>68</text:p>
          </table:table-cell>
          <table:table-cell office:value-type="string" calcext:value-type="string">
            <text:p>遁甲式水鏡</text:p>
          </table:table-cell>
          <table:table-cell office:value-type="string" calcext:value-type="string">
            <text:p>とんこうしきみかがみ</text:p>
          </table:table-cell>
          <table:table-cell office:value-type="string" calcext:value-type="string">
            <text:p>第４弾ブースターパック</text:p>
          </table:table-cell>
          <table:table-cell table:formula="of:=VLOOKUP([.G377];[$収録番号.$A$1:$収録番号.$B$9];2;0)" office:value-type="float" office:value="45" calcext:value-type="float">
            <text:p>45</text:p>
          </table:table-cell>
          <table:table-cell office:value-type="string" calcext:value-type="string">
            <text:p>R</text:p>
          </table:table-cell>
          <table:table-cell table:formula="of:=VLOOKUP([.I377];[$レアリティ番号.$A$1:$レアリティ番号.$B$4];2;0)" office:value-type="float" office:value="2" calcext:value-type="float">
            <text:p>2</text:p>
          </table:table-cell>
          <table:table-cell office:value-type="string" calcext:value-type="string">
            <text:p>マリョク</text:p>
          </table:table-cell>
          <table:table-cell table:formula="of:=VLOOKUP([.K377];[$種類番号.$A$1:$種類番号.$B$4];2;0)" office:value-type="float" office:value="4" calcext:value-type="float">
            <text:p>4</text:p>
          </table:table-cell>
          <table:table-cell office:value-type="string" calcext:value-type="string">
            <text:p>青</text:p>
          </table:table-cell>
          <table:table-cell table:formula="of:=VLOOKUP([.M377];[$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7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77];[$特性番号.$A$1:$特性番号.$B$8];2;0);0)" office:value-type="float" office:value="0" calcext:value-type="float">
            <text:p>0</text:p>
          </table:table-cell>
          <table:table-cell office:value-type="string" calcext:value-type="string">
            <text:p>相手のターンのブロックステップが開始したとき、魔力ゾーンのこれを表にして発動できる。自分の戦場のガーディアン1体を山札の上に戻して、戦場の寝ているイジンすべてを手札に戻す。</text:p>
          </table:table-cell>
          <table:table-cell table:style-name="ce8" office:value-type="string" calcext:value-type="string">
            <text:p>喪神</text:p>
          </table:table-cell>
          <table:table-cell table:formula="of:=IFERROR(VLOOKUP([.$V377];[$遺業能力番号.$A$1:$遺業能力番号.$B$9];2;0);0)" office:value-type="float" office:value="9" calcext:value-type="float">
            <text:p>9</text:p>
          </table:table-cell>
          <table:table-cell office:value-type="string" calcext:value-type="string">
            <text:p>https://one-draw.jp/ijinden/cardlist/004/card/04_068.png</text:p>
          </table:table-cell>
          <table:table-cell table:formula="of:=CONCATENATE([$JSON.$A$1];[.$C377];[$JSON.$B$1];[.$E377];[$JSON.$C$1];[.$F377];[$JSON.$D$1];IF(ISNA([.$S377]);&quot;null&quot;;&quot;&quot;&quot;&quot;&amp;[.$S377]&amp;&quot;&quot;&quot;&quot;);[$JSON.$E$1];[.$U377];[$JSON.$F$1];IF(ISNA([.$V377]);&quot;null&quot;;&quot;&quot;&quot;&quot;&amp;[.$V377]&amp;&quot;&quot;&quot;&quot;);[$JSON.$G$1];[.$X377];[$JSON.$H$1];[.$H377];[$JSON.$I$1];[.J377];[$JSON.$J$1];[.$L377];[$JSON.$K$1];[.$O377];[$JSON.$L$1];[.$N377];[$JSON.$M$1];[.$R377];[$JSON.$N$1];[.$T377];[$JSON.$O$1];[.$W377];[$JSON.$P$1];[.$A377];[$JSON.$Q$1];[.$B377];[$JSON.$R$1])" office:value-type="string" office:string-value="{&quot;id&quot;:&quot;4-68&quot;,&quot;name&quot;:&quot;遁甲式水鏡&quot;,&quot;kana&quot;:&quot;とんこうしきみかがみ&quot;,&quot;traitText&quot;:null,&quot;ruleText&quot;:&quot;相手のターンのブロックステップが開始したとき、魔力ゾーンのこれを表にして発動できる。自分の戦場のガーディアン1体を山札の上に戻して、戦場の寝ているイジンすべてを手札に戻す。&quot;,&quot;legacyText&quot;:&quot;喪神&quot;,&quot;imageUrl&quot;:&quot;https://one-draw.jp/ijinden/cardlist/004/card/04_068.png&quot;,&quot;expansion&quot;:45,&quot;rarity&quot;:2,&quot;type&quot;:4,&quot;level&quot;:1,&quot;color&quot;:2,&quot;term&quot;:0,&quot;trait&quot;:0,&quot;legacy&quot;:9,&quot;orderTable&quot;:377,&quot;orderDeck&quot;:354}," calcext:value-type="string">
            <text:p>{"id":"4-68","name":"遁甲式水鏡","kana":"とんこうしきみかがみ","traitText":null,"ruleText":"相手のターンのブロックステップが開始したとき、魔力ゾーンのこれを表にして発動できる。自分の戦場のガーディアン1体を山札の上に戻して、戦場の寝ているイジンすべてを手札に戻す。","legacyText":"喪神","imageUrl":"https://one-draw.jp/ijinden/cardlist/004/card/04_068.png","expansion":45,"rarity":2,"type":4,"level":1,"color":2,"term":0,"trait":0,"legacy":9,"orderTable":377,"orderDeck":354},</text:p>
          </table:table-cell>
          <table:table-cell table:number-columns-repeated="16347"/>
        </table:table-row>
        <table:table-row table:style-name="ro2">
          <table:table-cell office:value-type="float" office:value="378" calcext:value-type="float">
            <text:p>378</text:p>
          </table:table-cell>
          <table:table-cell office:value-type="float" office:value="338" calcext:value-type="float">
            <text:p>338</text:p>
          </table:table-cell>
          <table:table-cell office:value-type="string" calcext:value-type="string">
            <text:p>4-69</text:p>
          </table:table-cell>
          <table:table-cell office:value-type="float" office:value="69" calcext:value-type="float">
            <text:p>69</text:p>
          </table:table-cell>
          <table:table-cell office:value-type="string" calcext:value-type="string">
            <text:p>ブルーサークル</text:p>
          </table:table-cell>
          <table:table-cell office:value-type="string" calcext:value-type="string">
            <text:p>ぶるーさーくる</text:p>
          </table:table-cell>
          <table:table-cell office:value-type="string" calcext:value-type="string">
            <text:p>第４弾ブースターパック</text:p>
          </table:table-cell>
          <table:table-cell table:formula="of:=VLOOKUP([.G378];[$収録番号.$A$1:$収録番号.$B$9];2;0)" office:value-type="float" office:value="45" calcext:value-type="float">
            <text:p>45</text:p>
          </table:table-cell>
          <table:table-cell office:value-type="string" calcext:value-type="string">
            <text:p>N</text:p>
          </table:table-cell>
          <table:table-cell table:formula="of:=VLOOKUP([.I378];[$レアリティ番号.$A$1:$レアリティ番号.$B$4];2;0)" office:value-type="float" office:value="1" calcext:value-type="float">
            <text:p>1</text:p>
          </table:table-cell>
          <table:table-cell office:value-type="string" calcext:value-type="string">
            <text:p>マリョク</text:p>
          </table:table-cell>
          <table:table-cell table:formula="of:=VLOOKUP([.K378];[$種類番号.$A$1:$種類番号.$B$4];2;0)" office:value-type="float" office:value="4" calcext:value-type="float">
            <text:p>4</text:p>
          </table:table-cell>
          <table:table-cell office:value-type="string" calcext:value-type="string">
            <text:p>青</text:p>
          </table:table-cell>
          <table:table-cell table:formula="of:=VLOOKUP([.M378];[$色番号.$A$1:$色番号.$B$10];2;0)" office:value-type="float" office:value="2" calcext:value-type="float">
            <text:p>2</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7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78];[$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V378];[$遺業能力番号.$A$1:$遺業能力番号.$B$9];2;0);0)" office:value-type="float" office:value="5" calcext:value-type="float">
            <text:p>5</text:p>
          </table:table-cell>
          <table:table-cell office:value-type="string" calcext:value-type="string">
            <text:p>https://one-draw.jp/ijinden/cardlist/004/card/04_069.png</text:p>
          </table:table-cell>
          <table:table-cell table:formula="of:=CONCATENATE([$JSON.$A$1];[.$C378];[$JSON.$B$1];[.$E378];[$JSON.$C$1];[.$F378];[$JSON.$D$1];IF(ISNA([.$S378]);&quot;null&quot;;&quot;&quot;&quot;&quot;&amp;[.$S378]&amp;&quot;&quot;&quot;&quot;);[$JSON.$E$1];[.$U378];[$JSON.$F$1];IF(ISNA([.$V378]);&quot;null&quot;;&quot;&quot;&quot;&quot;&amp;[.$V378]&amp;&quot;&quot;&quot;&quot;);[$JSON.$G$1];[.$X378];[$JSON.$H$1];[.$H378];[$JSON.$I$1];[.J378];[$JSON.$J$1];[.$L378];[$JSON.$K$1];[.$O378];[$JSON.$L$1];[.$N378];[$JSON.$M$1];[.$R378];[$JSON.$N$1];[.$T378];[$JSON.$O$1];[.$W378];[$JSON.$P$1];[.$A378];[$JSON.$Q$1];[.$B378];[$JSON.$R$1])" office:value-type="string" office:string-value="{&quot;id&quot;:&quot;4-69&quot;,&quot;name&quot;:&quot;ブルーサークル&quot;,&quot;kana&quot;:&quot;ぶるー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69.png&quot;,&quot;expansion&quot;:45,&quot;rarity&quot;:1,&quot;type&quot;:4,&quot;level&quot;:0,&quot;color&quot;:2,&quot;term&quot;:0,&quot;trait&quot;:0,&quot;legacy&quot;:5,&quot;orderTable&quot;:378,&quot;orderDeck&quot;:338}," calcext:value-type="string">
            <text:p>{"id":"4-69","name":"ブルーサークル","kana":"ぶるーさーくる","traitText":null,"ruleText":"自分がイジン召喚する際、そのイジンのレベルは3だけ下がる。¶イジンが自分の戦場に置かれたとき、これを裏にする。","legacyText":"手札に戻す","imageUrl":"https://one-draw.jp/ijinden/cardlist/004/card/04_069.png","expansion":45,"rarity":1,"type":4,"level":0,"color":2,"term":0,"trait":0,"legacy":5,"orderTable":378,"orderDeck":338},</text:p>
          </table:table-cell>
          <table:table-cell table:number-columns-repeated="16347"/>
        </table:table-row>
        <table:table-row table:style-name="ro2">
          <table:table-cell office:value-type="float" office:value="379" calcext:value-type="float">
            <text:p>379</text:p>
          </table:table-cell>
          <table:table-cell office:value-type="float" office:value="360" calcext:value-type="float">
            <text:p>360</text:p>
          </table:table-cell>
          <table:table-cell office:value-type="string" calcext:value-type="string">
            <text:p>4-70</text:p>
          </table:table-cell>
          <table:table-cell office:value-type="float" office:value="70" calcext:value-type="float">
            <text:p>70</text:p>
          </table:table-cell>
          <table:table-cell office:value-type="string" calcext:value-type="string">
            <text:p>遁甲式木蓮</text:p>
          </table:table-cell>
          <table:table-cell office:value-type="string" calcext:value-type="string">
            <text:p>とんこうしきもくれん</text:p>
          </table:table-cell>
          <table:table-cell office:value-type="string" calcext:value-type="string">
            <text:p>第４弾ブースターパック</text:p>
          </table:table-cell>
          <table:table-cell table:formula="of:=VLOOKUP([.G379];[$収録番号.$A$1:$収録番号.$B$9];2;0)" office:value-type="float" office:value="45" calcext:value-type="float">
            <text:p>45</text:p>
          </table:table-cell>
          <table:table-cell office:value-type="string" calcext:value-type="string">
            <text:p>R</text:p>
          </table:table-cell>
          <table:table-cell table:formula="of:=VLOOKUP([.I379];[$レアリティ番号.$A$1:$レアリティ番号.$B$4];2;0)" office:value-type="float" office:value="2" calcext:value-type="float">
            <text:p>2</text:p>
          </table:table-cell>
          <table:table-cell office:value-type="string" calcext:value-type="string">
            <text:p>マリョク</text:p>
          </table:table-cell>
          <table:table-cell table:formula="of:=VLOOKUP([.K379];[$種類番号.$A$1:$種類番号.$B$4];2;0)" office:value-type="float" office:value="4" calcext:value-type="float">
            <text:p>4</text:p>
          </table:table-cell>
          <table:table-cell office:value-type="string" calcext:value-type="string">
            <text:p>緑</text:p>
          </table:table-cell>
          <table:table-cell table:formula="of:=VLOOKUP([.M379];[$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7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79];[$特性番号.$A$1:$特性番号.$B$8];2;0);0)" office:value-type="float" office:value="0" calcext:value-type="float">
            <text:p>0</text:p>
          </table:table-cell>
          <table:table-cell office:value-type="string" calcext:value-type="string">
            <text:p>相手のターンのブロックステップが開始したとき、魔力ゾーンのこれを表にして発動できる。自分の戦場のガーディアン1体を山札の上に戻して、アタッカーすべてをアタッカーでない状態にする。</text:p>
          </table:table-cell>
          <table:table-cell table:style-name="ce8" office:value-type="string" calcext:value-type="string">
            <text:p>喪神</text:p>
          </table:table-cell>
          <table:table-cell table:formula="of:=IFERROR(VLOOKUP([.$V379];[$遺業能力番号.$A$1:$遺業能力番号.$B$9];2;0);0)" office:value-type="float" office:value="9" calcext:value-type="float">
            <text:p>9</text:p>
          </table:table-cell>
          <table:table-cell office:value-type="string" calcext:value-type="string">
            <text:p>https://one-draw.jp/ijinden/cardlist/004/card/04_070.png</text:p>
          </table:table-cell>
          <table:table-cell table:formula="of:=CONCATENATE([$JSON.$A$1];[.$C379];[$JSON.$B$1];[.$E379];[$JSON.$C$1];[.$F379];[$JSON.$D$1];IF(ISNA([.$S379]);&quot;null&quot;;&quot;&quot;&quot;&quot;&amp;[.$S379]&amp;&quot;&quot;&quot;&quot;);[$JSON.$E$1];[.$U379];[$JSON.$F$1];IF(ISNA([.$V379]);&quot;null&quot;;&quot;&quot;&quot;&quot;&amp;[.$V379]&amp;&quot;&quot;&quot;&quot;);[$JSON.$G$1];[.$X379];[$JSON.$H$1];[.$H379];[$JSON.$I$1];[.J379];[$JSON.$J$1];[.$L379];[$JSON.$K$1];[.$O379];[$JSON.$L$1];[.$N379];[$JSON.$M$1];[.$R379];[$JSON.$N$1];[.$T379];[$JSON.$O$1];[.$W379];[$JSON.$P$1];[.$A379];[$JSON.$Q$1];[.$B379];[$JSON.$R$1])" office:value-type="string" office:string-value="{&quot;id&quot;:&quot;4-70&quot;,&quot;name&quot;:&quot;遁甲式木蓮&quot;,&quot;kana&quot;:&quot;とんこうしきもくれん&quot;,&quot;traitText&quot;:null,&quot;ruleText&quot;:&quot;相手のターンのブロックステップが開始したとき、魔力ゾーンのこれを表にして発動できる。自分の戦場のガーディアン1体を山札の上に戻して、アタッカーすべてをアタッカーでない状態にする。&quot;,&quot;legacyText&quot;:&quot;喪神&quot;,&quot;imageUrl&quot;:&quot;https://one-draw.jp/ijinden/cardlist/004/card/04_070.png&quot;,&quot;expansion&quot;:45,&quot;rarity&quot;:2,&quot;type&quot;:4,&quot;level&quot;:1,&quot;color&quot;:4,&quot;term&quot;:0,&quot;trait&quot;:0,&quot;legacy&quot;:9,&quot;orderTable&quot;:379,&quot;orderDeck&quot;:360}," calcext:value-type="string">
            <text:p>{"id":"4-70","name":"遁甲式木蓮","kana":"とんこうしきもくれん","traitText":null,"ruleText":"相手のターンのブロックステップが開始したとき、魔力ゾーンのこれを表にして発動できる。自分の戦場のガーディアン1体を山札の上に戻して、アタッカーすべてをアタッカーでない状態にする。","legacyText":"喪神","imageUrl":"https://one-draw.jp/ijinden/cardlist/004/card/04_070.png","expansion":45,"rarity":2,"type":4,"level":1,"color":4,"term":0,"trait":0,"legacy":9,"orderTable":379,"orderDeck":360},</text:p>
          </table:table-cell>
          <table:table-cell table:number-columns-repeated="16347"/>
        </table:table-row>
        <table:table-row table:style-name="ro2">
          <table:table-cell office:value-type="float" office:value="380" calcext:value-type="float">
            <text:p>380</text:p>
          </table:table-cell>
          <table:table-cell office:value-type="float" office:value="339" calcext:value-type="float">
            <text:p>339</text:p>
          </table:table-cell>
          <table:table-cell office:value-type="string" calcext:value-type="string">
            <text:p>4-71</text:p>
          </table:table-cell>
          <table:table-cell office:value-type="float" office:value="71" calcext:value-type="float">
            <text:p>71</text:p>
          </table:table-cell>
          <table:table-cell office:value-type="string" calcext:value-type="string">
            <text:p>グリーンサークル</text:p>
          </table:table-cell>
          <table:table-cell office:value-type="string" calcext:value-type="string">
            <text:p>ぐりーんさーくる</text:p>
          </table:table-cell>
          <table:table-cell office:value-type="string" calcext:value-type="string">
            <text:p>第４弾ブースターパック</text:p>
          </table:table-cell>
          <table:table-cell table:formula="of:=VLOOKUP([.G380];[$収録番号.$A$1:$収録番号.$B$9];2;0)" office:value-type="float" office:value="45" calcext:value-type="float">
            <text:p>45</text:p>
          </table:table-cell>
          <table:table-cell office:value-type="string" calcext:value-type="string">
            <text:p>N</text:p>
          </table:table-cell>
          <table:table-cell table:formula="of:=VLOOKUP([.I380];[$レアリティ番号.$A$1:$レアリティ番号.$B$4];2;0)" office:value-type="float" office:value="1" calcext:value-type="float">
            <text:p>1</text:p>
          </table:table-cell>
          <table:table-cell office:value-type="string" calcext:value-type="string">
            <text:p>マリョク</text:p>
          </table:table-cell>
          <table:table-cell table:formula="of:=VLOOKUP([.K380];[$種類番号.$A$1:$種類番号.$B$4];2;0)" office:value-type="float" office:value="4" calcext:value-type="float">
            <text:p>4</text:p>
          </table:table-cell>
          <table:table-cell office:value-type="string" calcext:value-type="string">
            <text:p>緑</text:p>
          </table:table-cell>
          <table:table-cell table:formula="of:=VLOOKUP([.M380];[$色番号.$A$1:$色番号.$B$10];2;0)" office:value-type="float" office:value="4" calcext:value-type="float">
            <text:p>4</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0];[$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V380];[$遺業能力番号.$A$1:$遺業能力番号.$B$9];2;0);0)" office:value-type="float" office:value="5" calcext:value-type="float">
            <text:p>5</text:p>
          </table:table-cell>
          <table:table-cell office:value-type="string" calcext:value-type="string">
            <text:p>https://one-draw.jp/ijinden/cardlist/004/card/04_071.png</text:p>
          </table:table-cell>
          <table:table-cell table:formula="of:=CONCATENATE([$JSON.$A$1];[.$C380];[$JSON.$B$1];[.$E380];[$JSON.$C$1];[.$F380];[$JSON.$D$1];IF(ISNA([.$S380]);&quot;null&quot;;&quot;&quot;&quot;&quot;&amp;[.$S380]&amp;&quot;&quot;&quot;&quot;);[$JSON.$E$1];[.$U380];[$JSON.$F$1];IF(ISNA([.$V380]);&quot;null&quot;;&quot;&quot;&quot;&quot;&amp;[.$V380]&amp;&quot;&quot;&quot;&quot;);[$JSON.$G$1];[.$X380];[$JSON.$H$1];[.$H380];[$JSON.$I$1];[.J380];[$JSON.$J$1];[.$L380];[$JSON.$K$1];[.$O380];[$JSON.$L$1];[.$N380];[$JSON.$M$1];[.$R380];[$JSON.$N$1];[.$T380];[$JSON.$O$1];[.$W380];[$JSON.$P$1];[.$A380];[$JSON.$Q$1];[.$B380];[$JSON.$R$1])" office:value-type="string" office:string-value="{&quot;id&quot;:&quot;4-71&quot;,&quot;name&quot;:&quot;グリーンサークル&quot;,&quot;kana&quot;:&quot;ぐりーん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1.png&quot;,&quot;expansion&quot;:45,&quot;rarity&quot;:1,&quot;type&quot;:4,&quot;level&quot;:0,&quot;color&quot;:4,&quot;term&quot;:0,&quot;trait&quot;:0,&quot;legacy&quot;:5,&quot;orderTable&quot;:380,&quot;orderDeck&quot;:339}," calcext:value-type="string">
            <text:p>{"id":"4-71","name":"グリーンサークル","kana":"ぐりーんさーくる","traitText":null,"ruleText":"自分がイジン召喚する際、そのイジンのレベルは3だけ下がる。¶イジンが自分の戦場に置かれたとき、これを裏にする。","legacyText":"手札に戻す","imageUrl":"https://one-draw.jp/ijinden/cardlist/004/card/04_071.png","expansion":45,"rarity":1,"type":4,"level":0,"color":4,"term":0,"trait":0,"legacy":5,"orderTable":380,"orderDeck":339},</text:p>
          </table:table-cell>
          <table:table-cell table:number-columns-repeated="16347"/>
        </table:table-row>
        <table:table-row table:style-name="ro2">
          <table:table-cell office:value-type="float" office:value="381" calcext:value-type="float">
            <text:p>381</text:p>
          </table:table-cell>
          <table:table-cell office:value-type="float" office:value="365" calcext:value-type="float">
            <text:p>365</text:p>
          </table:table-cell>
          <table:table-cell office:value-type="string" calcext:value-type="string">
            <text:p>4-72</text:p>
          </table:table-cell>
          <table:table-cell office:value-type="float" office:value="72" calcext:value-type="float">
            <text:p>72</text:p>
          </table:table-cell>
          <table:table-cell office:value-type="string" calcext:value-type="string">
            <text:p>ラ・コロール</text:p>
          </table:table-cell>
          <table:table-cell office:value-type="string" calcext:value-type="string">
            <text:p>らころーる</text:p>
          </table:table-cell>
          <table:table-cell office:value-type="string" calcext:value-type="string">
            <text:p>第４弾ブースターパック</text:p>
          </table:table-cell>
          <table:table-cell table:formula="of:=VLOOKUP([.G381];[$収録番号.$A$1:$収録番号.$B$9];2;0)" office:value-type="float" office:value="45" calcext:value-type="float">
            <text:p>45</text:p>
          </table:table-cell>
          <table:table-cell office:value-type="string" calcext:value-type="string">
            <text:p>N</text:p>
          </table:table-cell>
          <table:table-cell table:formula="of:=VLOOKUP([.I381];[$レアリティ番号.$A$1:$レアリティ番号.$B$4];2;0)" office:value-type="float" office:value="1" calcext:value-type="float">
            <text:p>1</text:p>
          </table:table-cell>
          <table:table-cell office:value-type="string" calcext:value-type="string">
            <text:p>マリョク</text:p>
          </table:table-cell>
          <table:table-cell table:formula="of:=VLOOKUP([.K381];[$種類番号.$A$1:$種類番号.$B$4];2;0)" office:value-type="float" office:value="4" calcext:value-type="float">
            <text:p>4</text:p>
          </table:table-cell>
          <table:table-cell office:value-type="string" calcext:value-type="string">
            <text:p>黄</text:p>
          </table:table-cell>
          <table:table-cell table:formula="of:=VLOOKUP([.M381];[$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1];[$特性番号.$A$1:$特性番号.$B$8];2;0);0)" office:value-type="float" office:value="0" calcext:value-type="float">
            <text:p>0</text:p>
          </table:table-cell>
          <table:table-cell office:value-type="string" calcext:value-type="string">
            <text:p>魔力ゾーンに置かれたとき、戦場のレベル2以下のイジン1体を指定して発動できる。そのイジンを山札の下に戻す。自分は、このターンに限り「バトルできない」を得る。</text:p>
          </table:table-cell>
          <table:table-cell table:style-name="ce8" office:value-type="string" calcext:value-type="string">
            <text:p>復元</text:p>
          </table:table-cell>
          <table:table-cell table:formula="of:=IFERROR(VLOOKUP([.$V381];[$遺業能力番号.$A$1:$遺業能力番号.$B$9];2;0);0)" office:value-type="float" office:value="3" calcext:value-type="float">
            <text:p>3</text:p>
          </table:table-cell>
          <table:table-cell office:value-type="string" calcext:value-type="string">
            <text:p>https://one-draw.jp/ijinden/cardlist/004/card/04_072.png</text:p>
          </table:table-cell>
          <table:table-cell table:formula="of:=CONCATENATE([$JSON.$A$1];[.$C381];[$JSON.$B$1];[.$E381];[$JSON.$C$1];[.$F381];[$JSON.$D$1];IF(ISNA([.$S381]);&quot;null&quot;;&quot;&quot;&quot;&quot;&amp;[.$S381]&amp;&quot;&quot;&quot;&quot;);[$JSON.$E$1];[.$U381];[$JSON.$F$1];IF(ISNA([.$V381]);&quot;null&quot;;&quot;&quot;&quot;&quot;&amp;[.$V381]&amp;&quot;&quot;&quot;&quot;);[$JSON.$G$1];[.$X381];[$JSON.$H$1];[.$H381];[$JSON.$I$1];[.J381];[$JSON.$J$1];[.$L381];[$JSON.$K$1];[.$O381];[$JSON.$L$1];[.$N381];[$JSON.$M$1];[.$R381];[$JSON.$N$1];[.$T381];[$JSON.$O$1];[.$W381];[$JSON.$P$1];[.$A381];[$JSON.$Q$1];[.$B381];[$JSON.$R$1])" office:value-type="string" office:string-value="{&quot;id&quot;:&quot;4-72&quot;,&quot;name&quot;:&quot;ラ・コロール&quot;,&quot;kana&quot;:&quot;らころーる&quot;,&quot;traitText&quot;:null,&quot;ruleText&quot;:&quot;魔力ゾーンに置かれたとき、戦場のレベル2以下のイジン1体を指定して発動できる。そのイジンを山札の下に戻す。自分は、このターンに限り「バトルできない」を得る。&quot;,&quot;legacyText&quot;:&quot;復元&quot;,&quot;imageUrl&quot;:&quot;https://one-draw.jp/ijinden/cardlist/004/card/04_072.png&quot;,&quot;expansion&quot;:45,&quot;rarity&quot;:1,&quot;type&quot;:4,&quot;level&quot;:1,&quot;color&quot;:8,&quot;term&quot;:0,&quot;trait&quot;:0,&quot;legacy&quot;:3,&quot;orderTable&quot;:381,&quot;orderDeck&quot;:365}," calcext:value-type="string">
            <text:p>{"id":"4-72","name":"ラ・コロール","kana":"らころーる","traitText":null,"ruleText":"魔力ゾーンに置かれたとき、戦場のレベル2以下のイジン1体を指定して発動できる。そのイジンを山札の下に戻す。自分は、このターンに限り「バトルできない」を得る。","legacyText":"復元","imageUrl":"https://one-draw.jp/ijinden/cardlist/004/card/04_072.png","expansion":45,"rarity":1,"type":4,"level":1,"color":8,"term":0,"trait":0,"legacy":3,"orderTable":381,"orderDeck":365},</text:p>
          </table:table-cell>
          <table:table-cell table:number-columns-repeated="16347"/>
        </table:table-row>
        <table:table-row table:style-name="ro2">
          <table:table-cell office:value-type="float" office:value="382" calcext:value-type="float">
            <text:p>382</text:p>
          </table:table-cell>
          <table:table-cell office:value-type="float" office:value="340" calcext:value-type="float">
            <text:p>340</text:p>
          </table:table-cell>
          <table:table-cell office:value-type="string" calcext:value-type="string">
            <text:p>4-73</text:p>
          </table:table-cell>
          <table:table-cell office:value-type="float" office:value="73" calcext:value-type="float">
            <text:p>73</text:p>
          </table:table-cell>
          <table:table-cell office:value-type="string" calcext:value-type="string">
            <text:p>イエローサークル</text:p>
          </table:table-cell>
          <table:table-cell office:value-type="string" calcext:value-type="string">
            <text:p>いえろーさーくる</text:p>
          </table:table-cell>
          <table:table-cell office:value-type="string" calcext:value-type="string">
            <text:p>第４弾ブースターパック</text:p>
          </table:table-cell>
          <table:table-cell table:formula="of:=VLOOKUP([.G382];[$収録番号.$A$1:$収録番号.$B$9];2;0)" office:value-type="float" office:value="45" calcext:value-type="float">
            <text:p>45</text:p>
          </table:table-cell>
          <table:table-cell office:value-type="string" calcext:value-type="string">
            <text:p>N</text:p>
          </table:table-cell>
          <table:table-cell table:formula="of:=VLOOKUP([.I382];[$レアリティ番号.$A$1:$レアリティ番号.$B$4];2;0)" office:value-type="float" office:value="1" calcext:value-type="float">
            <text:p>1</text:p>
          </table:table-cell>
          <table:table-cell office:value-type="string" calcext:value-type="string">
            <text:p>マリョク</text:p>
          </table:table-cell>
          <table:table-cell table:formula="of:=VLOOKUP([.K382];[$種類番号.$A$1:$種類番号.$B$4];2;0)" office:value-type="float" office:value="4" calcext:value-type="float">
            <text:p>4</text:p>
          </table:table-cell>
          <table:table-cell office:value-type="string" calcext:value-type="string">
            <text:p>黄</text:p>
          </table:table-cell>
          <table:table-cell table:formula="of:=VLOOKUP([.M382];[$色番号.$A$1:$色番号.$B$10];2;0)" office:value-type="float" office:value="8" calcext:value-type="float">
            <text:p>8</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2];[$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V382];[$遺業能力番号.$A$1:$遺業能力番号.$B$9];2;0);0)" office:value-type="float" office:value="5" calcext:value-type="float">
            <text:p>5</text:p>
          </table:table-cell>
          <table:table-cell office:value-type="string" calcext:value-type="string">
            <text:p>https://one-draw.jp/ijinden/cardlist/004/card/04_073.png</text:p>
          </table:table-cell>
          <table:table-cell table:formula="of:=CONCATENATE([$JSON.$A$1];[.$C382];[$JSON.$B$1];[.$E382];[$JSON.$C$1];[.$F382];[$JSON.$D$1];IF(ISNA([.$S382]);&quot;null&quot;;&quot;&quot;&quot;&quot;&amp;[.$S382]&amp;&quot;&quot;&quot;&quot;);[$JSON.$E$1];[.$U382];[$JSON.$F$1];IF(ISNA([.$V382]);&quot;null&quot;;&quot;&quot;&quot;&quot;&amp;[.$V382]&amp;&quot;&quot;&quot;&quot;);[$JSON.$G$1];[.$X382];[$JSON.$H$1];[.$H382];[$JSON.$I$1];[.J382];[$JSON.$J$1];[.$L382];[$JSON.$K$1];[.$O382];[$JSON.$L$1];[.$N382];[$JSON.$M$1];[.$R382];[$JSON.$N$1];[.$T382];[$JSON.$O$1];[.$W382];[$JSON.$P$1];[.$A382];[$JSON.$Q$1];[.$B382];[$JSON.$R$1])" office:value-type="string" office:string-value="{&quot;id&quot;:&quot;4-73&quot;,&quot;name&quot;:&quot;イエローサークル&quot;,&quot;kana&quot;:&quot;いえろー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3.png&quot;,&quot;expansion&quot;:45,&quot;rarity&quot;:1,&quot;type&quot;:4,&quot;level&quot;:0,&quot;color&quot;:8,&quot;term&quot;:0,&quot;trait&quot;:0,&quot;legacy&quot;:5,&quot;orderTable&quot;:382,&quot;orderDeck&quot;:340}," calcext:value-type="string">
            <text:p>{"id":"4-73","name":"イエローサークル","kana":"いえろーさーくる","traitText":null,"ruleText":"自分がイジン召喚する際、そのイジンのレベルは3だけ下がる。¶イジンが自分の戦場に置かれたとき、これを裏にする。","legacyText":"手札に戻す","imageUrl":"https://one-draw.jp/ijinden/cardlist/004/card/04_073.png","expansion":45,"rarity":1,"type":4,"level":0,"color":8,"term":0,"trait":0,"legacy":5,"orderTable":382,"orderDeck":340},</text:p>
          </table:table-cell>
          <table:table-cell table:number-columns-repeated="16347"/>
        </table:table-row>
        <table:table-row table:style-name="ro2">
          <table:table-cell office:value-type="float" office:value="383" calcext:value-type="float">
            <text:p>383</text:p>
          </table:table-cell>
          <table:table-cell office:value-type="float" office:value="371" calcext:value-type="float">
            <text:p>371</text:p>
          </table:table-cell>
          <table:table-cell office:value-type="string" calcext:value-type="string">
            <text:p>4-74</text:p>
          </table:table-cell>
          <table:table-cell office:value-type="float" office:value="74" calcext:value-type="float">
            <text:p>74</text:p>
          </table:table-cell>
          <table:table-cell office:value-type="string" calcext:value-type="string">
            <text:p>ディ・クローネ</text:p>
          </table:table-cell>
          <table:table-cell office:value-type="string" calcext:value-type="string">
            <text:p>でぃくろーね</text:p>
          </table:table-cell>
          <table:table-cell office:value-type="string" calcext:value-type="string">
            <text:p>第４弾ブースターパック</text:p>
          </table:table-cell>
          <table:table-cell table:formula="of:=VLOOKUP([.G383];[$収録番号.$A$1:$収録番号.$B$9];2;0)" office:value-type="float" office:value="45" calcext:value-type="float">
            <text:p>45</text:p>
          </table:table-cell>
          <table:table-cell office:value-type="string" calcext:value-type="string">
            <text:p>N</text:p>
          </table:table-cell>
          <table:table-cell table:formula="of:=VLOOKUP([.I383];[$レアリティ番号.$A$1:$レアリティ番号.$B$4];2;0)" office:value-type="float" office:value="1" calcext:value-type="float">
            <text:p>1</text:p>
          </table:table-cell>
          <table:table-cell office:value-type="string" calcext:value-type="string">
            <text:p>マリョク</text:p>
          </table:table-cell>
          <table:table-cell table:formula="of:=VLOOKUP([.K383];[$種類番号.$A$1:$種類番号.$B$4];2;0)" office:value-type="float" office:value="4" calcext:value-type="float">
            <text:p>4</text:p>
          </table:table-cell>
          <table:table-cell office:value-type="string" calcext:value-type="string">
            <text:p>紫</text:p>
          </table:table-cell>
          <table:table-cell table:formula="of:=VLOOKUP([.M383];[$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3];[$特性番号.$A$1:$特性番号.$B$8];2;0);0)" office:value-type="float" office:value="0" calcext:value-type="float">
            <text:p>0</text:p>
          </table:table-cell>
          <table:table-cell office:value-type="string" calcext:value-type="string">
            <text:p>魔力ゾーンに置かれたとき、戦場のパワー1000以下のイジン1体を指定して発動できる。そのイジンを山札の下に戻す。自分は、このターンに限り「バトルできない」を得る。</text:p>
          </table:table-cell>
          <table:table-cell table:style-name="ce8" office:value-type="string" calcext:value-type="string">
            <text:p>復元</text:p>
          </table:table-cell>
          <table:table-cell table:formula="of:=IFERROR(VLOOKUP([.$V383];[$遺業能力番号.$A$1:$遺業能力番号.$B$9];2;0);0)" office:value-type="float" office:value="3" calcext:value-type="float">
            <text:p>3</text:p>
          </table:table-cell>
          <table:table-cell office:value-type="string" calcext:value-type="string">
            <text:p>https://one-draw.jp/ijinden/cardlist/004/card/04_074.png</text:p>
          </table:table-cell>
          <table:table-cell table:formula="of:=CONCATENATE([$JSON.$A$1];[.$C383];[$JSON.$B$1];[.$E383];[$JSON.$C$1];[.$F383];[$JSON.$D$1];IF(ISNA([.$S383]);&quot;null&quot;;&quot;&quot;&quot;&quot;&amp;[.$S383]&amp;&quot;&quot;&quot;&quot;);[$JSON.$E$1];[.$U383];[$JSON.$F$1];IF(ISNA([.$V383]);&quot;null&quot;;&quot;&quot;&quot;&quot;&amp;[.$V383]&amp;&quot;&quot;&quot;&quot;);[$JSON.$G$1];[.$X383];[$JSON.$H$1];[.$H383];[$JSON.$I$1];[.J383];[$JSON.$J$1];[.$L383];[$JSON.$K$1];[.$O383];[$JSON.$L$1];[.$N383];[$JSON.$M$1];[.$R383];[$JSON.$N$1];[.$T383];[$JSON.$O$1];[.$W383];[$JSON.$P$1];[.$A383];[$JSON.$Q$1];[.$B383];[$JSON.$R$1])" office:value-type="string" office:string-value="{&quot;id&quot;:&quot;4-74&quot;,&quot;name&quot;:&quot;ディ・クローネ&quot;,&quot;kana&quot;:&quot;でぃくろーね&quot;,&quot;traitText&quot;:null,&quot;ruleText&quot;:&quot;魔力ゾーンに置かれたとき、戦場のパワー1000以下のイジン1体を指定して発動できる。そのイジンを山札の下に戻す。自分は、このターンに限り「バトルできない」を得る。&quot;,&quot;legacyText&quot;:&quot;復元&quot;,&quot;imageUrl&quot;:&quot;https://one-draw.jp/ijinden/cardlist/004/card/04_074.png&quot;,&quot;expansion&quot;:45,&quot;rarity&quot;:1,&quot;type&quot;:4,&quot;level&quot;:1,&quot;color&quot;:16,&quot;term&quot;:0,&quot;trait&quot;:0,&quot;legacy&quot;:3,&quot;orderTable&quot;:383,&quot;orderDeck&quot;:371}," calcext:value-type="string">
            <text:p>{"id":"4-74","name":"ディ・クローネ","kana":"でぃくろーね","traitText":null,"ruleText":"魔力ゾーンに置かれたとき、戦場のパワー1000以下のイジン1体を指定して発動できる。そのイジンを山札の下に戻す。自分は、このターンに限り「バトルできない」を得る。","legacyText":"復元","imageUrl":"https://one-draw.jp/ijinden/cardlist/004/card/04_074.png","expansion":45,"rarity":1,"type":4,"level":1,"color":16,"term":0,"trait":0,"legacy":3,"orderTable":383,"orderDeck":371},</text:p>
          </table:table-cell>
          <table:table-cell table:number-columns-repeated="16347"/>
        </table:table-row>
        <table:table-row table:style-name="ro2">
          <table:table-cell office:value-type="float" office:value="384" calcext:value-type="float">
            <text:p>384</text:p>
          </table:table-cell>
          <table:table-cell office:value-type="float" office:value="341" calcext:value-type="float">
            <text:p>341</text:p>
          </table:table-cell>
          <table:table-cell office:value-type="string" calcext:value-type="string">
            <text:p>4-75</text:p>
          </table:table-cell>
          <table:table-cell office:value-type="float" office:value="75" calcext:value-type="float">
            <text:p>75</text:p>
          </table:table-cell>
          <table:table-cell office:value-type="string" calcext:value-type="string">
            <text:p>パープルサークル</text:p>
          </table:table-cell>
          <table:table-cell office:value-type="string" calcext:value-type="string">
            <text:p>ぱーぷるさーくる</text:p>
          </table:table-cell>
          <table:table-cell office:value-type="string" calcext:value-type="string">
            <text:p>第４弾ブースターパック</text:p>
          </table:table-cell>
          <table:table-cell table:formula="of:=VLOOKUP([.G384];[$収録番号.$A$1:$収録番号.$B$9];2;0)" office:value-type="float" office:value="45" calcext:value-type="float">
            <text:p>45</text:p>
          </table:table-cell>
          <table:table-cell office:value-type="string" calcext:value-type="string">
            <text:p>N</text:p>
          </table:table-cell>
          <table:table-cell table:formula="of:=VLOOKUP([.I384];[$レアリティ番号.$A$1:$レアリティ番号.$B$4];2;0)" office:value-type="float" office:value="1" calcext:value-type="float">
            <text:p>1</text:p>
          </table:table-cell>
          <table:table-cell office:value-type="string" calcext:value-type="string">
            <text:p>マリョク</text:p>
          </table:table-cell>
          <table:table-cell table:formula="of:=VLOOKUP([.K384];[$種類番号.$A$1:$種類番号.$B$4];2;0)" office:value-type="float" office:value="4" calcext:value-type="float">
            <text:p>4</text:p>
          </table:table-cell>
          <table:table-cell office:value-type="string" calcext:value-type="string">
            <text:p>紫</text:p>
          </table:table-cell>
          <table:table-cell table:formula="of:=VLOOKUP([.M384];[$色番号.$A$1:$色番号.$B$10];2;0)" office:value-type="float" office:value="16" calcext:value-type="float">
            <text:p>16</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4];[$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V384];[$遺業能力番号.$A$1:$遺業能力番号.$B$9];2;0);0)" office:value-type="float" office:value="5" calcext:value-type="float">
            <text:p>5</text:p>
          </table:table-cell>
          <table:table-cell office:value-type="string" calcext:value-type="string">
            <text:p>https://one-draw.jp/ijinden/cardlist/004/card/04_075.png</text:p>
          </table:table-cell>
          <table:table-cell table:formula="of:=CONCATENATE([$JSON.$A$1];[.$C384];[$JSON.$B$1];[.$E384];[$JSON.$C$1];[.$F384];[$JSON.$D$1];IF(ISNA([.$S384]);&quot;null&quot;;&quot;&quot;&quot;&quot;&amp;[.$S384]&amp;&quot;&quot;&quot;&quot;);[$JSON.$E$1];[.$U384];[$JSON.$F$1];IF(ISNA([.$V384]);&quot;null&quot;;&quot;&quot;&quot;&quot;&amp;[.$V384]&amp;&quot;&quot;&quot;&quot;);[$JSON.$G$1];[.$X384];[$JSON.$H$1];[.$H384];[$JSON.$I$1];[.J384];[$JSON.$J$1];[.$L384];[$JSON.$K$1];[.$O384];[$JSON.$L$1];[.$N384];[$JSON.$M$1];[.$R384];[$JSON.$N$1];[.$T384];[$JSON.$O$1];[.$W384];[$JSON.$P$1];[.$A384];[$JSON.$Q$1];[.$B384];[$JSON.$R$1])" office:value-type="string" office:string-value="{&quot;id&quot;:&quot;4-75&quot;,&quot;name&quot;:&quot;パープルサークル&quot;,&quot;kana&quot;:&quot;ぱーぷる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5.png&quot;,&quot;expansion&quot;:45,&quot;rarity&quot;:1,&quot;type&quot;:4,&quot;level&quot;:0,&quot;color&quot;:16,&quot;term&quot;:0,&quot;trait&quot;:0,&quot;legacy&quot;:5,&quot;orderTable&quot;:384,&quot;orderDeck&quot;:341}," calcext:value-type="string">
            <text:p>{"id":"4-75","name":"パープルサークル","kana":"ぱーぷるさーくる","traitText":null,"ruleText":"自分がイジン召喚する際、そのイジンのレベルは3だけ下がる。¶イジンが自分の戦場に置かれたとき、これを裏にする。","legacyText":"手札に戻す","imageUrl":"https://one-draw.jp/ijinden/cardlist/004/card/04_075.png","expansion":45,"rarity":1,"type":4,"level":0,"color":16,"term":0,"trait":0,"legacy":5,"orderTable":384,"orderDeck":341},</text:p>
          </table:table-cell>
          <table:table-cell table:number-columns-repeated="16347"/>
        </table:table-row>
        <table:table-row table:style-name="ro2">
          <table:table-cell office:value-type="float" office:value="385" calcext:value-type="float">
            <text:p>385</text:p>
          </table:table-cell>
          <table:table-cell office:value-type="float" office:value="377" calcext:value-type="float">
            <text:p>377</text:p>
          </table:table-cell>
          <table:table-cell office:value-type="string" calcext:value-type="string">
            <text:p>4-76</text:p>
          </table:table-cell>
          <table:table-cell office:value-type="float" office:value="76" calcext:value-type="float">
            <text:p>76</text:p>
          </table:table-cell>
          <table:table-cell office:value-type="string" calcext:value-type="string">
            <text:p>トランスポーター</text:p>
          </table:table-cell>
          <table:table-cell office:value-type="string" calcext:value-type="string">
            <text:p>とらんすぽーたー</text:p>
          </table:table-cell>
          <table:table-cell office:value-type="string" calcext:value-type="string">
            <text:p>第４弾ブースターパック</text:p>
          </table:table-cell>
          <table:table-cell table:formula="of:=VLOOKUP([.G385];[$収録番号.$A$1:$収録番号.$B$9];2;0)" office:value-type="float" office:value="45" calcext:value-type="float">
            <text:p>45</text:p>
          </table:table-cell>
          <table:table-cell office:value-type="string" calcext:value-type="string">
            <text:p>N</text:p>
          </table:table-cell>
          <table:table-cell table:formula="of:=VLOOKUP([.I385];[$レアリティ番号.$A$1:$レアリティ番号.$B$4];2;0)" office:value-type="float" office:value="1" calcext:value-type="float">
            <text:p>1</text:p>
          </table:table-cell>
          <table:table-cell office:value-type="string" calcext:value-type="string">
            <text:p>マリョク</text:p>
          </table:table-cell>
          <table:table-cell table:formula="of:=VLOOKUP([.K385];[$種類番号.$A$1:$種類番号.$B$4];2;0)" office:value-type="float" office:value="4" calcext:value-type="float">
            <text:p>4</text:p>
          </table:table-cell>
          <table:table-cell office:value-type="string" calcext:value-type="string">
            <text:p>無色</text:p>
          </table:table-cell>
          <table:table-cell table:formula="of:=VLOOKUP([.M385];[$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5];[$特性番号.$A$1:$特性番号.$B$8];2;0);0)" office:value-type="float" office:value="0" calcext:value-type="float">
            <text:p>0</text:p>
          </table:table-cell>
          <table:table-cell office:value-type="string" calcext:value-type="string">
            <text:p>魔力ゾーンに置かれたとき、以下から1つを発動する。¶・自分の手札のレベル2以下のイジン1体を指定して発動できる。そのイジンを戦場に置く。¶・1ドローする。</text:p>
          </table:table-cell>
          <table:table-cell table:style-name="ce8" office:value-type="string" calcext:value-type="string">
            <text:p>1ドローする</text:p>
          </table:table-cell>
          <table:table-cell table:formula="of:=IFERROR(VLOOKUP([.$V385];[$遺業能力番号.$A$1:$遺業能力番号.$B$9];2;0);0)" office:value-type="float" office:value="4" calcext:value-type="float">
            <text:p>4</text:p>
          </table:table-cell>
          <table:table-cell office:value-type="string" calcext:value-type="string">
            <text:p>https://one-draw.jp/ijinden/cardlist/004/card/04_076.png</text:p>
          </table:table-cell>
          <table:table-cell table:formula="of:=CONCATENATE([$JSON.$A$1];[.$C385];[$JSON.$B$1];[.$E385];[$JSON.$C$1];[.$F385];[$JSON.$D$1];IF(ISNA([.$S385]);&quot;null&quot;;&quot;&quot;&quot;&quot;&amp;[.$S385]&amp;&quot;&quot;&quot;&quot;);[$JSON.$E$1];[.$U385];[$JSON.$F$1];IF(ISNA([.$V385]);&quot;null&quot;;&quot;&quot;&quot;&quot;&amp;[.$V385]&amp;&quot;&quot;&quot;&quot;);[$JSON.$G$1];[.$X385];[$JSON.$H$1];[.$H385];[$JSON.$I$1];[.J385];[$JSON.$J$1];[.$L385];[$JSON.$K$1];[.$O385];[$JSON.$L$1];[.$N385];[$JSON.$M$1];[.$R385];[$JSON.$N$1];[.$T385];[$JSON.$O$1];[.$W385];[$JSON.$P$1];[.$A385];[$JSON.$Q$1];[.$B385];[$JSON.$R$1])" office:value-type="string" office:string-value="{&quot;id&quot;:&quot;4-76&quot;,&quot;name&quot;:&quot;トランスポーター&quot;,&quot;kana&quot;:&quot;とらんすぽーたー&quot;,&quot;traitText&quot;:null,&quot;ruleText&quot;:&quot;魔力ゾーンに置かれたとき、以下から1つを発動する。¶・自分の手札のレベル2以下のイジン1体を指定して発動できる。そのイジンを戦場に置く。¶・1ドローする。&quot;,&quot;legacyText&quot;:&quot;1ドローする&quot;,&quot;imageUrl&quot;:&quot;https://one-draw.jp/ijinden/cardlist/004/card/04_076.png&quot;,&quot;expansion&quot;:45,&quot;rarity&quot;:1,&quot;type&quot;:4,&quot;level&quot;:1,&quot;color&quot;:64,&quot;term&quot;:0,&quot;trait&quot;:0,&quot;legacy&quot;:4,&quot;orderTable&quot;:385,&quot;orderDeck&quot;:377}," calcext:value-type="string">
            <text:p>{"id":"4-76","name":"トランスポーター","kana":"とらんすぽーたー","traitText":null,"ruleText":"魔力ゾーンに置かれたとき、以下から1つを発動する。¶・自分の手札のレベル2以下のイジン1体を指定して発動できる。そのイジンを戦場に置く。¶・1ドローする。","legacyText":"1ドローする","imageUrl":"https://one-draw.jp/ijinden/cardlist/004/card/04_076.png","expansion":45,"rarity":1,"type":4,"level":1,"color":64,"term":0,"trait":0,"legacy":4,"orderTable":385,"orderDeck":377},</text:p>
          </table:table-cell>
          <table:table-cell table:number-columns-repeated="16347"/>
        </table:table-row>
        <table:table-row table:style-name="ro2">
          <table:table-cell office:value-type="float" office:value="386" calcext:value-type="float">
            <text:p>386</text:p>
          </table:table-cell>
          <table:table-cell office:value-type="float" office:value="387" calcext:value-type="float">
            <text:p>387</text:p>
          </table:table-cell>
          <table:table-cell office:value-type="string" calcext:value-type="string">
            <text:p>4-77</text:p>
          </table:table-cell>
          <table:table-cell office:value-type="float" office:value="77" calcext:value-type="float">
            <text:p>77</text:p>
          </table:table-cell>
          <table:table-cell office:value-type="string" calcext:value-type="string">
            <text:p>アセイミー</text:p>
          </table:table-cell>
          <table:table-cell office:value-type="string" calcext:value-type="string">
            <text:p>あせいみー</text:p>
          </table:table-cell>
          <table:table-cell office:value-type="string" calcext:value-type="string">
            <text:p>第４弾ブースターパック</text:p>
          </table:table-cell>
          <table:table-cell table:formula="of:=VLOOKUP([.G386];[$収録番号.$A$1:$収録番号.$B$9];2;0)" office:value-type="float" office:value="45" calcext:value-type="float">
            <text:p>45</text:p>
          </table:table-cell>
          <table:table-cell office:value-type="string" calcext:value-type="string">
            <text:p>R</text:p>
          </table:table-cell>
          <table:table-cell table:formula="of:=VLOOKUP([.I386];[$レアリティ番号.$A$1:$レアリティ番号.$B$4];2;0)" office:value-type="float" office:value="2" calcext:value-type="float">
            <text:p>2</text:p>
          </table:table-cell>
          <table:table-cell office:value-type="string" calcext:value-type="string">
            <text:p>マリョク</text:p>
          </table:table-cell>
          <table:table-cell table:formula="of:=VLOOKUP([.K386];[$種類番号.$A$1:$種類番号.$B$4];2;0)" office:value-type="float" office:value="4" calcext:value-type="float">
            <text:p>4</text:p>
          </table:table-cell>
          <table:table-cell office:value-type="string" calcext:value-type="string">
            <text:p>無色</text:p>
          </table:table-cell>
          <table:table-cell table:formula="of:=VLOOKUP([.M386];[$色番号.$A$1:$色番号.$B$10];2;0)" office:value-type="float" office:value="64" calcext:value-type="float">
            <text:p>6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6];[$特性番号.$A$1:$特性番号.$B$8];2;0);0)" office:value-type="float" office:value="0" calcext:value-type="float">
            <text:p>0</text:p>
          </table:table-cell>
          <table:table-cell office:value-type="string" calcext:value-type="string">
            <text:p>魔力ゾーンに置かれたとき、自分の魔力ゾーンの裏のカードで、表が『サークル』マリョクのもの1つ以上を指定して発動できる。それらのカードすべてを表にする。</text:p>
          </table:table-cell>
          <table:table-cell table:style-name="ce8" office:value-type="string" calcext:value-type="string">
            <text:p>復元</text:p>
          </table:table-cell>
          <table:table-cell table:formula="of:=IFERROR(VLOOKUP([.$V386];[$遺業能力番号.$A$1:$遺業能力番号.$B$9];2;0);0)" office:value-type="float" office:value="3" calcext:value-type="float">
            <text:p>3</text:p>
          </table:table-cell>
          <table:table-cell office:value-type="string" calcext:value-type="string">
            <text:p>https://one-draw.jp/ijinden/cardlist/004/card/04_077.png</text:p>
          </table:table-cell>
          <table:table-cell table:formula="of:=CONCATENATE([$JSON.$A$1];[.$C386];[$JSON.$B$1];[.$E386];[$JSON.$C$1];[.$F386];[$JSON.$D$1];IF(ISNA([.$S386]);&quot;null&quot;;&quot;&quot;&quot;&quot;&amp;[.$S386]&amp;&quot;&quot;&quot;&quot;);[$JSON.$E$1];[.$U386];[$JSON.$F$1];IF(ISNA([.$V386]);&quot;null&quot;;&quot;&quot;&quot;&quot;&amp;[.$V386]&amp;&quot;&quot;&quot;&quot;);[$JSON.$G$1];[.$X386];[$JSON.$H$1];[.$H386];[$JSON.$I$1];[.J386];[$JSON.$J$1];[.$L386];[$JSON.$K$1];[.$O386];[$JSON.$L$1];[.$N386];[$JSON.$M$1];[.$R386];[$JSON.$N$1];[.$T386];[$JSON.$O$1];[.$W386];[$JSON.$P$1];[.$A386];[$JSON.$Q$1];[.$B386];[$JSON.$R$1])" office:value-type="string" office:string-value="{&quot;id&quot;:&quot;4-77&quot;,&quot;name&quot;:&quot;アセイミー&quot;,&quot;kana&quot;:&quot;あせいみー&quot;,&quot;traitText&quot;:null,&quot;ruleText&quot;:&quot;魔力ゾーンに置かれたとき、自分の魔力ゾーンの裏のカードで、表が『サークル』マリョクのもの1つ以上を指定して発動できる。それらのカードすべてを表にする。&quot;,&quot;legacyText&quot;:&quot;復元&quot;,&quot;imageUrl&quot;:&quot;https://one-draw.jp/ijinden/cardlist/004/card/04_077.png&quot;,&quot;expansion&quot;:45,&quot;rarity&quot;:2,&quot;type&quot;:4,&quot;level&quot;:2,&quot;color&quot;:64,&quot;term&quot;:0,&quot;trait&quot;:0,&quot;legacy&quot;:3,&quot;orderTable&quot;:386,&quot;orderDeck&quot;:387}," calcext:value-type="string">
            <text:p>{"id":"4-77","name":"アセイミー","kana":"あせいみー","traitText":null,"ruleText":"魔力ゾーンに置かれたとき、自分の魔力ゾーンの裏のカードで、表が『サークル』マリョクのもの1つ以上を指定して発動できる。それらのカードすべてを表にする。","legacyText":"復元","imageUrl":"https://one-draw.jp/ijinden/cardlist/004/card/04_077.png","expansion":45,"rarity":2,"type":4,"level":2,"color":64,"term":0,"trait":0,"legacy":3,"orderTable":386,"orderDeck":387},</text:p>
          </table:table-cell>
          <table:table-cell table:number-columns-repeated="16347"/>
        </table:table-row>
        <table:table-row table:style-name="ro2">
          <table:table-cell office:value-type="float" office:value="387" calcext:value-type="float">
            <text:p>387</text:p>
          </table:table-cell>
          <table:table-cell office:value-type="float" office:value="388" calcext:value-type="float">
            <text:p>388</text:p>
          </table:table-cell>
          <table:table-cell office:value-type="string" calcext:value-type="string">
            <text:p>4-78</text:p>
          </table:table-cell>
          <table:table-cell office:value-type="float" office:value="78" calcext:value-type="float">
            <text:p>78</text:p>
          </table:table-cell>
          <table:table-cell office:value-type="string" calcext:value-type="string">
            <text:p>ホプロン</text:p>
          </table:table-cell>
          <table:table-cell office:value-type="string" calcext:value-type="string">
            <text:p>ほぷろん</text:p>
          </table:table-cell>
          <table:table-cell office:value-type="string" calcext:value-type="string">
            <text:p>第４弾ブースターパック</text:p>
          </table:table-cell>
          <table:table-cell table:formula="of:=VLOOKUP([.G387];[$収録番号.$A$1:$収録番号.$B$9];2;0)" office:value-type="float" office:value="45" calcext:value-type="float">
            <text:p>45</text:p>
          </table:table-cell>
          <table:table-cell office:value-type="string" calcext:value-type="string">
            <text:p>N</text:p>
          </table:table-cell>
          <table:table-cell table:formula="of:=VLOOKUP([.I387];[$レアリティ番号.$A$1:$レアリティ番号.$B$4];2;0)" office:value-type="float" office:value="1" calcext:value-type="float">
            <text:p>1</text:p>
          </table:table-cell>
          <table:table-cell office:value-type="string" calcext:value-type="string">
            <text:p>マリョク</text:p>
          </table:table-cell>
          <table:table-cell table:formula="of:=VLOOKUP([.K387];[$種類番号.$A$1:$種類番号.$B$4];2;0)" office:value-type="float" office:value="4" calcext:value-type="float">
            <text:p>4</text:p>
          </table:table-cell>
          <table:table-cell office:value-type="string" calcext:value-type="string">
            <text:p>無色</text:p>
          </table:table-cell>
          <table:table-cell table:formula="of:=VLOOKUP([.M387];[$色番号.$A$1:$色番号.$B$10];2;0)" office:value-type="float" office:value="64" calcext:value-type="float">
            <text:p>6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7];[$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バトルの間、自分の戦場のイジンは、相手の能力によって破壊されず、相手の能力によって戦場を離れない。</text:p>
          </table:table-cell>
          <table:table-cell table:style-name="ce8" office:value-type="string" calcext:value-type="string">
            <text:p>復元</text:p>
          </table:table-cell>
          <table:table-cell table:formula="of:=IFERROR(VLOOKUP([.$V387];[$遺業能力番号.$A$1:$遺業能力番号.$B$9];2;0);0)" office:value-type="float" office:value="3" calcext:value-type="float">
            <text:p>3</text:p>
          </table:table-cell>
          <table:table-cell office:value-type="string" calcext:value-type="string">
            <text:p>https://one-draw.jp/ijinden/cardlist/004/card/04_078.png</text:p>
          </table:table-cell>
          <table:table-cell table:formula="of:=CONCATENATE([$JSON.$A$1];[.$C387];[$JSON.$B$1];[.$E387];[$JSON.$C$1];[.$F387];[$JSON.$D$1];IF(ISNA([.$S387]);&quot;null&quot;;&quot;&quot;&quot;&quot;&amp;[.$S387]&amp;&quot;&quot;&quot;&quot;);[$JSON.$E$1];[.$U387];[$JSON.$F$1];IF(ISNA([.$V387]);&quot;null&quot;;&quot;&quot;&quot;&quot;&amp;[.$V387]&amp;&quot;&quot;&quot;&quot;);[$JSON.$G$1];[.$X387];[$JSON.$H$1];[.$H387];[$JSON.$I$1];[.J387];[$JSON.$J$1];[.$L387];[$JSON.$K$1];[.$O387];[$JSON.$L$1];[.$N387];[$JSON.$M$1];[.$R387];[$JSON.$N$1];[.$T387];[$JSON.$O$1];[.$W387];[$JSON.$P$1];[.$A387];[$JSON.$Q$1];[.$B387];[$JSON.$R$1])" office:value-type="string" office:string-value="{&quot;id&quot;:&quot;4-78&quot;,&quot;name&quot;:&quot;ホプロン&quot;,&quot;kana&quot;:&quot;ほぷろん&quot;,&quot;traitText&quot;:null,&quot;ruleText&quot;:&quot;イジン召喚によってイジンが自分の戦場に置かれる際、そのイジンに装備させてもよい。¶装備 : バトルの間、自分の戦場のイジンは、相手の能力によって破壊されず、相手の能力によって戦場を離れない。&quot;,&quot;legacyText&quot;:&quot;復元&quot;,&quot;imageUrl&quot;:&quot;https://one-draw.jp/ijinden/cardlist/004/card/04_078.png&quot;,&quot;expansion&quot;:45,&quot;rarity&quot;:1,&quot;type&quot;:4,&quot;level&quot;:2,&quot;color&quot;:64,&quot;term&quot;:0,&quot;trait&quot;:0,&quot;legacy&quot;:3,&quot;orderTable&quot;:387,&quot;orderDeck&quot;:388}," calcext:value-type="string">
            <text:p>{"id":"4-78","name":"ホプロン","kana":"ほぷろん","traitText":null,"ruleText":"イジン召喚によってイジンが自分の戦場に置かれる際、そのイジンに装備させてもよい。¶装備 : バトルの間、自分の戦場のイジンは、相手の能力によって破壊されず、相手の能力によって戦場を離れない。","legacyText":"復元","imageUrl":"https://one-draw.jp/ijinden/cardlist/004/card/04_078.png","expansion":45,"rarity":1,"type":4,"level":2,"color":64,"term":0,"trait":0,"legacy":3,"orderTable":387,"orderDeck":388},</text:p>
          </table:table-cell>
          <table:table-cell table:number-columns-repeated="16347"/>
        </table:table-row>
        <table:table-row table:style-name="ro2">
          <table:table-cell office:value-type="float" office:value="388" calcext:value-type="float">
            <text:p>388</text:p>
          </table:table-cell>
          <table:table-cell office:value-type="float" office:value="378" calcext:value-type="float">
            <text:p>378</text:p>
          </table:table-cell>
          <table:table-cell office:value-type="string" calcext:value-type="string">
            <text:p>4-79</text:p>
          </table:table-cell>
          <table:table-cell office:value-type="float" office:value="79" calcext:value-type="float">
            <text:p>79</text:p>
          </table:table-cell>
          <table:table-cell office:value-type="string" calcext:value-type="string">
            <text:p>ピクシーダスト</text:p>
          </table:table-cell>
          <table:table-cell office:value-type="string" calcext:value-type="string">
            <text:p>ぴくしーだすと</text:p>
          </table:table-cell>
          <table:table-cell office:value-type="string" calcext:value-type="string">
            <text:p>第４弾ブースターパック</text:p>
          </table:table-cell>
          <table:table-cell table:formula="of:=VLOOKUP([.G388];[$収録番号.$A$1:$収録番号.$B$9];2;0)" office:value-type="float" office:value="45" calcext:value-type="float">
            <text:p>45</text:p>
          </table:table-cell>
          <table:table-cell office:value-type="string" calcext:value-type="string">
            <text:p>N</text:p>
          </table:table-cell>
          <table:table-cell table:formula="of:=VLOOKUP([.I388];[$レアリティ番号.$A$1:$レアリティ番号.$B$4];2;0)" office:value-type="float" office:value="1" calcext:value-type="float">
            <text:p>1</text:p>
          </table:table-cell>
          <table:table-cell office:value-type="string" calcext:value-type="string">
            <text:p>マリョク</text:p>
          </table:table-cell>
          <table:table-cell table:formula="of:=VLOOKUP([.K388];[$種類番号.$A$1:$種類番号.$B$4];2;0)" office:value-type="float" office:value="4" calcext:value-type="float">
            <text:p>4</text:p>
          </table:table-cell>
          <table:table-cell office:value-type="string" calcext:value-type="string">
            <text:p>無色</text:p>
          </table:table-cell>
          <table:table-cell table:formula="of:=VLOOKUP([.M388];[$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8];[$特性番号.$A$1:$特性番号.$B$8];2;0);0)" office:value-type="float" office:value="0" calcext:value-type="float">
            <text:p>0</text:p>
          </table:table-cell>
          <table:table-cell office:value-type="string" calcext:value-type="string">
            <text:p>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text:p>
          </table:table-cell>
          <table:table-cell table:style-name="ce8" office:value-type="string" calcext:value-type="string">
            <text:p>魔力化</text:p>
          </table:table-cell>
          <table:table-cell table:formula="of:=IFERROR(VLOOKUP([.$V388];[$遺業能力番号.$A$1:$遺業能力番号.$B$9];2;0);0)" office:value-type="float" office:value="1" calcext:value-type="float">
            <text:p>1</text:p>
          </table:table-cell>
          <table:table-cell office:value-type="string" calcext:value-type="string">
            <text:p>https://one-draw.jp/ijinden/cardlist/004/card/04_079.png</text:p>
          </table:table-cell>
          <table:table-cell table:formula="of:=CONCATENATE([$JSON.$A$1];[.$C388];[$JSON.$B$1];[.$E388];[$JSON.$C$1];[.$F388];[$JSON.$D$1];IF(ISNA([.$S388]);&quot;null&quot;;&quot;&quot;&quot;&quot;&amp;[.$S388]&amp;&quot;&quot;&quot;&quot;);[$JSON.$E$1];[.$U388];[$JSON.$F$1];IF(ISNA([.$V388]);&quot;null&quot;;&quot;&quot;&quot;&quot;&amp;[.$V388]&amp;&quot;&quot;&quot;&quot;);[$JSON.$G$1];[.$X388];[$JSON.$H$1];[.$H388];[$JSON.$I$1];[.J388];[$JSON.$J$1];[.$L388];[$JSON.$K$1];[.$O388];[$JSON.$L$1];[.$N388];[$JSON.$M$1];[.$R388];[$JSON.$N$1];[.$T388];[$JSON.$O$1];[.$W388];[$JSON.$P$1];[.$A388];[$JSON.$Q$1];[.$B388];[$JSON.$R$1])" office:value-type="string" office:string-value="{&quot;id&quot;:&quot;4-79&quot;,&quot;name&quot;:&quot;ピクシーダスト&quot;,&quot;kana&quot;:&quot;ぴくしーだすと&quot;,&quot;traitText&quot;:null,&quot;ruleText&quot;:&quot;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quot;,&quot;legacyText&quot;:&quot;魔力化&quot;,&quot;imageUrl&quot;:&quot;https://one-draw.jp/ijinden/cardlist/004/card/04_079.png&quot;,&quot;expansion&quot;:45,&quot;rarity&quot;:1,&quot;type&quot;:4,&quot;level&quot;:1,&quot;color&quot;:64,&quot;term&quot;:0,&quot;trait&quot;:0,&quot;legacy&quot;:1,&quot;orderTable&quot;:388,&quot;orderDeck&quot;:378}," calcext:value-type="string">
            <text:p>{"id":"4-79","name":"ピクシーダスト","kana":"ぴくしーだすと","traitText":null,"ruleText":"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legacyText":"魔力化","imageUrl":"https://one-draw.jp/ijinden/cardlist/004/card/04_079.png","expansion":45,"rarity":1,"type":4,"level":1,"color":64,"term":0,"trait":0,"legacy":1,"orderTable":388,"orderDeck":378},</text:p>
          </table:table-cell>
          <table:table-cell table:number-columns-repeated="16347"/>
        </table:table-row>
        <table:table-row table:style-name="ro2">
          <table:table-cell table:number-columns-repeated="2" office:value-type="float" office:value="389" calcext:value-type="float">
            <text:p>389</text:p>
          </table:table-cell>
          <table:table-cell office:value-type="string" calcext:value-type="string">
            <text:p>4-80</text:p>
          </table:table-cell>
          <table:table-cell office:value-type="float" office:value="80" calcext:value-type="float">
            <text:p>80</text:p>
          </table:table-cell>
          <table:table-cell office:value-type="string" calcext:value-type="string">
            <text:p>カルドロン</text:p>
          </table:table-cell>
          <table:table-cell office:value-type="string" calcext:value-type="string">
            <text:p>かるどろん</text:p>
          </table:table-cell>
          <table:table-cell office:value-type="string" calcext:value-type="string">
            <text:p>第４弾ブースターパック</text:p>
          </table:table-cell>
          <table:table-cell table:formula="of:=VLOOKUP([.G389];[$収録番号.$A$1:$収録番号.$B$9];2;0)" office:value-type="float" office:value="45" calcext:value-type="float">
            <text:p>45</text:p>
          </table:table-cell>
          <table:table-cell office:value-type="string" calcext:value-type="string">
            <text:p>R</text:p>
          </table:table-cell>
          <table:table-cell table:formula="of:=VLOOKUP([.I389];[$レアリティ番号.$A$1:$レアリティ番号.$B$4];2;0)" office:value-type="float" office:value="2" calcext:value-type="float">
            <text:p>2</text:p>
          </table:table-cell>
          <table:table-cell office:value-type="string" calcext:value-type="string">
            <text:p>マリョク</text:p>
          </table:table-cell>
          <table:table-cell table:formula="of:=VLOOKUP([.K389];[$種類番号.$A$1:$種類番号.$B$4];2;0)" office:value-type="float" office:value="4" calcext:value-type="float">
            <text:p>4</text:p>
          </table:table-cell>
          <table:table-cell office:value-type="string" calcext:value-type="string">
            <text:p>無色</text:p>
          </table:table-cell>
          <table:table-cell table:formula="of:=VLOOKUP([.M389];[$色番号.$A$1:$色番号.$B$10];2;0)" office:value-type="float" office:value="64" calcext:value-type="float">
            <text:p>6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9];[$特性番号.$A$1:$特性番号.$B$8];2;0);0)" office:value-type="float" office:value="0" calcext:value-type="float">
            <text:p>0</text:p>
          </table:table-cell>
          <table:table-cell office:value-type="string" calcext:value-type="string">
            <text:p>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text:p>
          </table:table-cell>
          <table:table-cell table:style-name="ce8" office:value-type="string" calcext:value-type="string">
            <text:p>魔力化</text:p>
          </table:table-cell>
          <table:table-cell table:formula="of:=IFERROR(VLOOKUP([.$V389];[$遺業能力番号.$A$1:$遺業能力番号.$B$9];2;0);0)" office:value-type="float" office:value="1" calcext:value-type="float">
            <text:p>1</text:p>
          </table:table-cell>
          <table:table-cell office:value-type="string" calcext:value-type="string">
            <text:p>https://one-draw.jp/ijinden/cardlist/004/card/04_080.png</text:p>
          </table:table-cell>
          <table:table-cell table:formula="of:=CONCATENATE([$JSON.$A$1];[.$C389];[$JSON.$B$1];[.$E389];[$JSON.$C$1];[.$F389];[$JSON.$D$1];IF(ISNA([.$S389]);&quot;null&quot;;&quot;&quot;&quot;&quot;&amp;[.$S389]&amp;&quot;&quot;&quot;&quot;);[$JSON.$E$1];[.$U389];[$JSON.$F$1];IF(ISNA([.$V389]);&quot;null&quot;;&quot;&quot;&quot;&quot;&amp;[.$V389]&amp;&quot;&quot;&quot;&quot;);[$JSON.$G$1];[.$X389];[$JSON.$H$1];[.$H389];[$JSON.$I$1];[.J389];[$JSON.$J$1];[.$L389];[$JSON.$K$1];[.$O389];[$JSON.$L$1];[.$N389];[$JSON.$M$1];[.$R389];[$JSON.$N$1];[.$T389];[$JSON.$O$1];[.$W389];[$JSON.$P$1];[.$A389];[$JSON.$Q$1];[.$B389];[$JSON.$R$1])" office:value-type="string" office:string-value="{&quot;id&quot;:&quot;4-80&quot;,&quot;name&quot;:&quot;カルドロン&quot;,&quot;kana&quot;:&quot;かるどろん&quot;,&quot;traitText&quot;:null,&quot;ruleText&quot;:&quot;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quot;,&quot;legacyText&quot;:&quot;魔力化&quot;,&quot;imageUrl&quot;:&quot;https://one-draw.jp/ijinden/cardlist/004/card/04_080.png&quot;,&quot;expansion&quot;:45,&quot;rarity&quot;:2,&quot;type&quot;:4,&quot;level&quot;:2,&quot;color&quot;:64,&quot;term&quot;:0,&quot;trait&quot;:0,&quot;legacy&quot;:1,&quot;orderTable&quot;:389,&quot;orderDeck&quot;:389}," calcext:value-type="string">
            <text:p>{"id":"4-80","name":"カルドロン","kana":"かるどろん","traitText":null,"ruleText":"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legacyText":"魔力化","imageUrl":"https://one-draw.jp/ijinden/cardlist/004/card/04_080.png","expansion":45,"rarity":2,"type":4,"level":2,"color":64,"term":0,"trait":0,"legacy":1,"orderTable":389,"orderDeck":389},</text:p>
          </table:table-cell>
          <table:table-cell table:number-columns-repeated="16347"/>
        </table:table-row>
        <table:table-row table:style-name="ro2" table:number-rows-repeated="1048186">
          <table:table-cell table:number-columns-repeated="16372"/>
        </table:table-row>
        <table:table-row table:style-name="ro2">
          <table:table-cell table:number-columns-repeated="16372"/>
        </table:table-row>
      </table:table>
      <table:table table:name="収録番号" table:style-name="ta1">
        <table:table-column table:style-name="co6" table:default-cell-style-name="Default"/>
        <table:table-column table:style-name="co3" table:default-cell-style-name="Default"/>
        <table:table-row table:style-name="ro2">
          <table:table-cell office:value-type="string" calcext:value-type="string">
            <text:p>伝説の武将デッキ</text:p>
          </table:table-cell>
          <table:table-cell office:value-type="float" office:value="10" calcext:value-type="float">
            <text:p>10</text:p>
          </table:table-cell>
        </table:table-row>
        <table:table-row table:style-name="ro2">
          <table:table-cell office:value-type="string" calcext:value-type="string">
            <text:p>知と美の革命デッキ</text:p>
          </table:table-cell>
          <table:table-cell office:value-type="float" office:value="11" calcext:value-type="float">
            <text:p>11</text:p>
          </table:table-cell>
        </table:table-row>
        <table:table-row table:style-name="ro2">
          <table:table-cell office:value-type="string" calcext:value-type="string">
            <text:p>日本の大天才デッキ</text:p>
          </table:table-cell>
          <table:table-cell office:value-type="float" office:value="12" calcext:value-type="float">
            <text:p>12</text:p>
          </table:table-cell>
        </table:table-row>
        <table:table-row table:style-name="ro2">
          <table:table-cell office:value-type="string" calcext:value-type="string">
            <text:p>第１弾ブースターパック</text:p>
          </table:table-cell>
          <table:table-cell office:value-type="float" office:value="15" calcext:value-type="float">
            <text:p>15</text:p>
          </table:table-cell>
        </table:table-row>
        <table:table-row table:style-name="ro2">
          <table:table-cell office:value-type="string" calcext:value-type="string">
            <text:p>三国の英傑デッキ</text:p>
          </table:table-cell>
          <table:table-cell office:value-type="float" office:value="20" calcext:value-type="float">
            <text:p>20</text:p>
          </table:table-cell>
        </table:table-row>
        <table:table-row table:style-name="ro2">
          <table:table-cell office:value-type="string" calcext:value-type="string">
            <text:p>第２弾ブースターパック</text:p>
          </table:table-cell>
          <table:table-cell office:value-type="float" office:value="25" calcext:value-type="float">
            <text:p>25</text:p>
          </table:table-cell>
        </table:table-row>
        <table:table-row table:style-name="ro2">
          <table:table-cell office:value-type="string" calcext:value-type="string">
            <text:p>発展する医療デッキ</text:p>
          </table:table-cell>
          <table:table-cell office:value-type="float" office:value="30" calcext:value-type="float">
            <text:p>30</text:p>
          </table:table-cell>
        </table:table-row>
        <table:table-row table:style-name="ro2">
          <table:table-cell office:value-type="string" calcext:value-type="string">
            <text:p>第３弾ブースターパック</text:p>
          </table:table-cell>
          <table:table-cell office:value-type="float" office:value="35" calcext:value-type="float">
            <text:p>35</text:p>
          </table:table-cell>
        </table:table-row>
        <table:table-row table:style-name="ro2">
          <table:table-cell office:value-type="string" calcext:value-type="string">
            <text:p>第４弾ブースターパック</text:p>
          </table:table-cell>
          <table:table-cell office:value-type="float" office:value="45" calcext:value-type="float">
            <text:p>45</text:p>
          </table:table-cell>
        </table:table-row>
      </table:table>
      <table:table table:name="レアリティ番号" table:style-name="ta1">
        <table:table-column table:style-name="co10" table:default-cell-style-name="Default"/>
        <table:table-column table:style-name="co16" table:default-cell-style-name="Default"/>
        <table:table-row table:style-name="ro2">
          <table:table-cell office:value-type="string" calcext:value-type="string">
            <text:p>N</text:p>
          </table:table-cell>
          <table:table-cell office:value-type="float" office:value="1" calcext:value-type="float">
            <text:p>1</text:p>
          </table:table-cell>
        </table:table-row>
        <table:table-row table:style-name="ro2">
          <table:table-cell office:value-type="string" calcext:value-type="string">
            <text:p>R</text:p>
          </table:table-cell>
          <table:table-cell office:value-type="float" office:value="2" calcext:value-type="float">
            <text:p>2</text:p>
          </table:table-cell>
        </table:table-row>
        <table:table-row table:style-name="ro2">
          <table:table-cell office:value-type="string" calcext:value-type="string">
            <text:p>SR</text:p>
          </table:table-cell>
          <table:table-cell office:value-type="float" office:value="4" calcext:value-type="float">
            <text:p>4</text:p>
          </table:table-cell>
        </table:table-row>
        <table:table-row table:style-name="ro2">
          <table:table-cell office:value-type="string" calcext:value-type="string">
            <text:p>PSR</text:p>
          </table:table-cell>
          <table:table-cell office:value-type="float" office:value="8" calcext:value-type="float">
            <text:p>8</text:p>
          </table:table-cell>
        </table:table-row>
      </table:table>
      <table:table table:name="種類番号" table:style-name="ta1">
        <table:table-column table:style-name="co9" table:default-cell-style-name="Default"/>
        <table:table-column table:style-name="co16" table:default-cell-style-name="Default"/>
        <table:table-row table:style-name="ro2">
          <table:table-cell office:value-type="string" calcext:value-type="string">
            <text:p>イジン</text:p>
          </table:table-cell>
          <table:table-cell office:value-type="float" office:value="1" calcext:value-type="float">
            <text:p>1</text:p>
          </table:table-cell>
        </table:table-row>
        <table:table-row table:style-name="ro2">
          <table:table-cell office:value-type="string" calcext:value-type="string">
            <text:p>ハイケイ</text:p>
          </table:table-cell>
          <table:table-cell office:value-type="float" office:value="2" calcext:value-type="float">
            <text:p>2</text:p>
          </table:table-cell>
        </table:table-row>
        <table:table-row table:style-name="ro2">
          <table:table-cell office:value-type="string" calcext:value-type="string">
            <text:p>マホウ</text:p>
          </table:table-cell>
          <table:table-cell office:value-type="float" office:value="3" calcext:value-type="float">
            <text:p>3</text:p>
          </table:table-cell>
        </table:table-row>
        <table:table-row table:style-name="ro2">
          <table:table-cell office:value-type="string" calcext:value-type="string">
            <text:p>マリョク</text:p>
          </table:table-cell>
          <table:table-cell office:value-type="float" office:value="4" calcext:value-type="float">
            <text:p>4</text:p>
          </table:table-cell>
        </table:table-row>
      </table:table>
      <table:table table:name="色番号" table:style-name="ta1">
        <table:table-column table:style-name="co10" table:default-cell-style-name="Default"/>
        <table:table-column table:style-name="co3" table:default-cell-style-name="Default"/>
        <table:table-row table:style-name="ro2">
          <table:table-cell office:value-type="string" calcext:value-type="string">
            <text:p>赤</text:p>
          </table:table-cell>
          <table:table-cell office:value-type="float" office:value="1" calcext:value-type="float">
            <text:p>1</text:p>
          </table:table-cell>
        </table:table-row>
        <table:table-row table:style-name="ro2">
          <table:table-cell office:value-type="string" calcext:value-type="string">
            <text:p>青</text:p>
          </table:table-cell>
          <table:table-cell office:value-type="float" office:value="2" calcext:value-type="float">
            <text:p>2</text:p>
          </table:table-cell>
        </table:table-row>
        <table:table-row table:style-name="ro2">
          <table:table-cell office:value-type="string" calcext:value-type="string">
            <text:p>緑</text:p>
          </table:table-cell>
          <table:table-cell office:value-type="float" office:value="4" calcext:value-type="float">
            <text:p>4</text:p>
          </table:table-cell>
        </table:table-row>
        <table:table-row table:style-name="ro2">
          <table:table-cell office:value-type="string" calcext:value-type="string">
            <text:p>黄</text:p>
          </table:table-cell>
          <table:table-cell office:value-type="float" office:value="8" calcext:value-type="float">
            <text:p>8</text:p>
          </table:table-cell>
        </table:table-row>
        <table:table-row table:style-name="ro2">
          <table:table-cell office:value-type="string" calcext:value-type="string">
            <text:p>紫</text:p>
          </table:table-cell>
          <table:table-cell office:value-type="float" office:value="16" calcext:value-type="float">
            <text:p>16</text:p>
          </table:table-cell>
        </table:table-row>
        <table:table-row table:style-name="ro2">
          <table:table-cell office:value-type="string" calcext:value-type="string">
            <text:p>多色</text:p>
          </table:table-cell>
          <table:table-cell office:value-type="float" office:value="32" calcext:value-type="float">
            <text:p>32</text:p>
          </table:table-cell>
        </table:table-row>
        <table:table-row table:style-name="ro2">
          <table:table-cell office:value-type="string" calcext:value-type="string">
            <text:p>赤黄</text:p>
          </table:table-cell>
          <table:table-cell office:value-type="float" office:value="41" calcext:value-type="float">
            <text:p>41</text:p>
          </table:table-cell>
        </table:table-row>
        <table:table-row table:style-name="ro2">
          <table:table-cell office:value-type="string" calcext:value-type="string">
            <text:p>青黄</text:p>
          </table:table-cell>
          <table:table-cell office:value-type="float" office:value="42" calcext:value-type="float">
            <text:p>42</text:p>
          </table:table-cell>
        </table:table-row>
        <table:table-row table:style-name="ro2">
          <table:table-cell office:value-type="string" calcext:value-type="string">
            <text:p>緑黄</text:p>
          </table:table-cell>
          <table:table-cell office:value-type="float" office:value="44" calcext:value-type="float">
            <text:p>44</text:p>
          </table:table-cell>
        </table:table-row>
        <table:table-row table:style-name="ro2">
          <table:table-cell office:value-type="string" calcext:value-type="string">
            <text:p>無色</text:p>
          </table:table-cell>
          <table:table-cell office:value-type="float" office:value="64" calcext:value-type="float">
            <text:p>64</text:p>
          </table:table-cell>
        </table:table-row>
      </table:table>
      <table:table table:name="能力語番号" table:style-name="ta1">
        <table:table-column table:style-name="co11" table:default-cell-style-name="Default"/>
        <table:table-column table:style-name="co1" table:default-cell-style-name="Default"/>
        <table:table-row table:style-name="ro2">
          <table:table-cell office:value-type="string" calcext:value-type="string">
            <text:p>航海</text:p>
          </table:table-cell>
          <table:table-cell office:value-type="float" office:value="1" calcext:value-type="float">
            <text:p>1</text:p>
          </table:table-cell>
        </table:table-row>
        <table:table-row table:style-name="ro2">
          <table:table-cell office:value-type="string" calcext:value-type="string">
            <text:p>執筆</text:p>
          </table:table-cell>
          <table:table-cell office:value-type="float" office:value="2" calcext:value-type="float">
            <text:p>2</text:p>
          </table:table-cell>
        </table:table-row>
        <table:table-row table:style-name="ro2">
          <table:table-cell office:value-type="string" calcext:value-type="string">
            <text:p>決起</text:p>
          </table:table-cell>
          <table:table-cell office:value-type="float" office:value="4" calcext:value-type="float">
            <text:p>4</text:p>
          </table:table-cell>
        </table:table-row>
        <table:table-row table:style-name="ro2">
          <table:table-cell office:value-type="string" calcext:value-type="string">
            <text:p>徴募</text:p>
          </table:table-cell>
          <table:table-cell office:value-type="float" office:value="8" calcext:value-type="float">
            <text:p>8</text:p>
          </table:table-cell>
        </table:table-row>
        <table:table-row table:style-name="ro2">
          <table:table-cell office:value-type="string" calcext:value-type="string">
            <text:p>魔導</text:p>
          </table:table-cell>
          <table:table-cell office:value-type="float" office:value="16" calcext:value-type="float">
            <text:p>16</text:p>
          </table:table-cell>
        </table:table-row>
        <table:table-row table:style-name="ro2">
          <table:table-cell office:value-type="string" calcext:value-type="string">
            <text:p>赤魔導</text:p>
          </table:table-cell>
          <table:table-cell table:formula="of:=16+32" office:value-type="float" office:value="48" calcext:value-type="float">
            <text:p>48</text:p>
          </table:table-cell>
        </table:table-row>
        <table:table-row table:style-name="ro2">
          <table:table-cell office:value-type="string" calcext:value-type="string">
            <text:p>青魔導</text:p>
          </table:table-cell>
          <table:table-cell table:formula="of:=16+64" office:value-type="float" office:value="80" calcext:value-type="float">
            <text:p>80</text:p>
          </table:table-cell>
        </table:table-row>
        <table:table-row table:style-name="ro2">
          <table:table-cell office:value-type="string" calcext:value-type="string">
            <text:p>緑魔導</text:p>
          </table:table-cell>
          <table:table-cell table:formula="of:=16+128" office:value-type="float" office:value="144" calcext:value-type="float">
            <text:p>144</text:p>
          </table:table-cell>
        </table:table-row>
        <table:table-row table:style-name="ro2">
          <table:table-cell office:value-type="string" calcext:value-type="string">
            <text:p>黄魔導</text:p>
          </table:table-cell>
          <table:table-cell table:formula="of:=16+256" office:value-type="float" office:value="272" calcext:value-type="float">
            <text:p>272</text:p>
          </table:table-cell>
        </table:table-row>
        <table:table-row table:style-name="ro2">
          <table:table-cell office:value-type="string" calcext:value-type="string">
            <text:p>紫魔導</text:p>
          </table:table-cell>
          <table:table-cell table:formula="of:=16+512" office:value-type="float" office:value="528" calcext:value-type="float">
            <text:p>528</text:p>
          </table:table-cell>
        </table:table-row>
      </table:table>
      <table:table table:name="特性番号" table:style-name="ta1">
        <table:table-column table:style-name="co12" table:default-cell-style-name="Default"/>
        <table:table-column table:style-name="co3" table:default-cell-style-name="Default"/>
        <table:table-row table:style-name="ro2">
          <table:table-cell office:value-type="string" calcext:value-type="string">
            <text:p>剣術</text:p>
          </table:table-cell>
          <table:table-cell office:value-type="float" office:value="1" calcext:value-type="float">
            <text:p>1</text:p>
          </table:table-cell>
        </table:table-row>
        <table:table-row table:style-name="ro2">
          <table:table-cell office:value-type="string" calcext:value-type="string">
            <text:p>美術</text:p>
          </table:table-cell>
          <table:table-cell office:value-type="float" office:value="2" calcext:value-type="float">
            <text:p>2</text:p>
          </table:table-cell>
        </table:table-row>
        <table:table-row table:style-name="ro2">
          <table:table-cell office:value-type="string" calcext:value-type="string">
            <text:p>音楽</text:p>
          </table:table-cell>
          <table:table-cell office:value-type="float" office:value="4" calcext:value-type="float">
            <text:p>4</text:p>
          </table:table-cell>
        </table:table-row>
        <table:table-row table:style-name="ro2">
          <table:table-cell office:value-type="string" calcext:value-type="string">
            <text:p>思想</text:p>
          </table:table-cell>
          <table:table-cell office:value-type="float" office:value="8" calcext:value-type="float">
            <text:p>8</text:p>
          </table:table-cell>
        </table:table-row>
        <table:table-row table:style-name="ro2">
          <table:table-cell office:value-type="string" calcext:value-type="string">
            <text:p>美術 思想</text:p>
          </table:table-cell>
          <table:table-cell office:value-type="float" office:value="10" calcext:value-type="float">
            <text:p>10</text:p>
          </table:table-cell>
        </table:table-row>
        <table:table-row table:style-name="ro2">
          <table:table-cell office:value-type="string" calcext:value-type="string">
            <text:p>医術</text:p>
          </table:table-cell>
          <table:table-cell office:value-type="float" office:value="16" calcext:value-type="float">
            <text:p>16</text:p>
          </table:table-cell>
        </table:table-row>
        <table:table-row table:style-name="ro2">
          <table:table-cell office:value-type="string" calcext:value-type="string">
            <text:p>志願</text:p>
          </table:table-cell>
          <table:table-cell office:value-type="float" office:value="32" calcext:value-type="float">
            <text:p>32</text:p>
          </table:table-cell>
        </table:table-row>
        <table:table-row table:style-name="ro2">
          <table:table-cell office:value-type="string" calcext:value-type="string">
            <text:p>剣術 志願</text:p>
          </table:table-cell>
          <table:table-cell office:value-type="float" office:value="33" calcext:value-type="float">
            <text:p>33</text:p>
          </table:table-cell>
        </table:table-row>
      </table:table>
      <table:table table:name="遺業能力番号" table:style-name="ta1">
        <table:table-column table:style-name="co17" table:default-cell-style-name="Default"/>
        <table:table-column table:style-name="co16" table:default-cell-style-name="Default"/>
        <table:table-row table:style-name="ro2">
          <table:table-cell office:value-type="string" calcext:value-type="string">
            <text:p>魔力化</text:p>
          </table:table-cell>
          <table:table-cell office:value-type="float" office:value="1" calcext:value-type="float">
            <text:p>1</text:p>
          </table:table-cell>
        </table:table-row>
        <table:table-row table:style-name="ro2">
          <table:table-cell office:value-type="string" calcext:value-type="string">
            <text:p>冥府発動</text:p>
          </table:table-cell>
          <table:table-cell office:value-type="float" office:value="2" calcext:value-type="float">
            <text:p>2</text:p>
          </table:table-cell>
        </table:table-row>
        <table:table-row table:style-name="ro2">
          <table:table-cell office:value-type="string" calcext:value-type="string">
            <text:p>復元</text:p>
          </table:table-cell>
          <table:table-cell office:value-type="float" office:value="3" calcext:value-type="float">
            <text:p>3</text:p>
          </table:table-cell>
        </table:table-row>
        <table:table-row table:style-name="ro2">
          <table:table-cell office:value-type="string" calcext:value-type="string">
            <text:p>1ドローする</text:p>
          </table:table-cell>
          <table:table-cell office:value-type="float" office:value="4" calcext:value-type="float">
            <text:p>4</text:p>
          </table:table-cell>
        </table:table-row>
        <table:table-row table:style-name="ro2">
          <table:table-cell office:value-type="string" calcext:value-type="string">
            <text:p>手札に戻す</text:p>
          </table:table-cell>
          <table:table-cell office:value-type="float" office:value="5" calcext:value-type="float">
            <text:p>5</text:p>
          </table:table-cell>
        </table:table-row>
        <table:table-row table:style-name="ro2">
          <table:table-cell office:value-type="string" calcext:value-type="string">
            <text:p>反魂</text:p>
          </table:table-cell>
          <table:table-cell office:value-type="float" office:value="6" calcext:value-type="float">
            <text:p>6</text:p>
          </table:table-cell>
        </table:table-row>
        <table:table-row table:style-name="ro2">
          <table:table-cell office:value-type="string" calcext:value-type="string">
            <text:p>山札の上か下に戻す</text:p>
          </table:table-cell>
          <table:table-cell office:value-type="float" office:value="7" calcext:value-type="float">
            <text:p>7</text:p>
          </table:table-cell>
        </table:table-row>
        <table:table-row table:style-name="ro2">
          <table:table-cell office:value-type="string" calcext:value-type="string">
            <text:p>木霊</text:p>
          </table:table-cell>
          <table:table-cell office:value-type="float" office:value="8" calcext:value-type="float">
            <text:p>8</text:p>
          </table:table-cell>
        </table:table-row>
        <table:table-row table:style-name="ro2">
          <table:table-cell office:value-type="string" calcext:value-type="string">
            <text:p>喪神</text:p>
          </table:table-cell>
          <table:table-cell office:value-type="float" office:value="9" calcext:value-type="float">
            <text:p>9</text:p>
          </table:table-cell>
        </table:table-row>
      </table:table>
      <table:table table:name="JSON" table:style-name="ta1">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1"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row table:style-name="ro2">
          <table:table-cell office:value-type="string" calcext:value-type="string">
            <text:p>{"id":"</text:p>
          </table:table-cell>
          <table:table-cell office:value-type="string" calcext:value-type="string">
            <text:p>","name":"</text:p>
          </table:table-cell>
          <table:table-cell office:value-type="string" calcext:value-type="string">
            <text:p>","kana":"</text:p>
          </table:table-cell>
          <table:table-cell office:value-type="string" calcext:value-type="string">
            <text:p>","traitText":</text:p>
          </table:table-cell>
          <table:table-cell office:value-type="string" calcext:value-type="string">
            <text:p>,"ruleText":"</text:p>
          </table:table-cell>
          <table:table-cell office:value-type="string" calcext:value-type="string">
            <text:p>","legacyText":</text:p>
          </table:table-cell>
          <table:table-cell office:value-type="string" calcext:value-type="string">
            <text:p>,"imageUrl":"</text:p>
          </table:table-cell>
          <table:table-cell office:value-type="string" calcext:value-type="string">
            <text:p>","expansion":</text:p>
          </table:table-cell>
          <table:table-cell office:value-type="string" calcext:value-type="string">
            <text:p>,"rarity":</text:p>
          </table:table-cell>
          <table:table-cell office:value-type="string" calcext:value-type="string">
            <text:p>,"type":</text:p>
          </table:table-cell>
          <table:table-cell office:value-type="string" calcext:value-type="string">
            <text:p>,"level":</text:p>
          </table:table-cell>
          <table:table-cell office:value-type="string" calcext:value-type="string">
            <text:p>,"color":</text:p>
          </table:table-cell>
          <table:table-cell office:value-type="string" calcext:value-type="string">
            <text:p>,"term":</text:p>
          </table:table-cell>
          <table:table-cell office:value-type="string" calcext:value-type="string">
            <text:p><text:span text:style-name="T2">,"trait"</text:span>:</text:p>
          </table:table-cell>
          <table:table-cell office:value-type="string" calcext:value-type="string">
            <text:p><text:span text:style-name="T2">,"legacy"</text:span>:</text:p>
          </table:table-cell>
          <table:table-cell office:value-type="string" calcext:value-type="string">
            <text:p>,"orderTable":</text:p>
          </table:table-cell>
          <table:table-cell office:value-type="string" calcext:value-type="string">
            <text:p>,"orderDeck":</text:p>
          </table:table-cell>
          <table:table-cell office:value-type="string" calcext:value-type="string">
            <text:p>},</text:p>
          </table:table-cell>
        </table:table-row>
      </table:table>
      <table:table table:name="注意" table:style-name="ta1">
        <table:table-column table:style-name="co15" table:default-cell-style-name="Default"/>
        <table:table-row table:style-name="ro3">
          <table:table-cell office:value-type="string" calcext:value-type="string">
            <text:p>テーブル順309番とデッキ順201番は土方歳三PSRに予約</text:p>
          </table:table-cell>
        </table:table-row>
        <table:table-row table:style-name="ro3">
          <table:table-cell office:value-type="string" calcext:value-type="string">
            <text:p>テーブル順390番とデッキ順236番はカール大帝PSRに予約</text:p>
          </table:table-cell>
        </table:table-row>
      </table:table>
      <table:named-expressions/>
      <table:database-ranges>
        <table:database-range table:name="__Anonymous_Sheet_DB__0" table:target-range-address="Sheet1.A1:Sheet1.Y38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9">0000/00/00</text:date>, <text:time style:data-style-name="N2" text:time-value="19:45:44.682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1T08:31:42.845000000</meta:creation-date>
    <dc:date>2025-05-09T19:46:52.885000000</dc:date>
    <meta:editing-duration>PT17H35M34S</meta:editing-duration>
    <meta:editing-cycles>457</meta:editing-cycles>
    <meta:generator>LibreOffice/7.5.3.2$Windows_X86_64 LibreOffice_project/9f56dff12ba03b9acd7730a5a481eea045e468f3</meta:generator>
    <meta:document-statistic meta:table-count="10" meta:cell-count="9843" meta:object-count="0"/>
  </office:meta>
</office:document-meta>
</file>