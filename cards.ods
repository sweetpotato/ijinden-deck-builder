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069cm"/>
    </style:style>
    <style:style style:name="co3" style:family="table-column">
      <style:table-column-properties fo:break-before="auto" style:column-width="0.665cm"/>
    </style:style>
    <style:style style:name="co4" style:family="table-column">
      <style:table-column-properties fo:break-before="auto" style:column-width="7.458cm"/>
    </style:style>
    <style:style style:name="co5" style:family="table-column">
      <style:table-column-properties fo:break-before="auto" style:column-width="6.715cm"/>
    </style:style>
    <style:style style:name="co6" style:family="table-column">
      <style:table-column-properties fo:break-before="auto" style:column-width="4.232cm"/>
    </style:style>
    <style:style style:name="co7" style:family="table-column">
      <style:table-column-properties fo:break-before="auto" style:column-width="0.686cm"/>
    </style:style>
    <style:style style:name="co8" style:family="table-column">
      <style:table-column-properties fo:break-before="auto" style:column-width="0.771cm"/>
    </style:style>
    <style:style style:name="co9" style:family="table-column">
      <style:table-column-properties fo:break-before="auto" style:column-width="1.727cm"/>
    </style:style>
    <style:style style:name="co10" style:family="table-column">
      <style:table-column-properties fo:break-before="auto" style:column-width="1.005cm"/>
    </style:style>
    <style:style style:name="co11" style:family="table-column">
      <style:table-column-properties fo:break-before="auto" style:column-width="1.365cm"/>
    </style:style>
    <style:style style:name="co12" style:family="table-column">
      <style:table-column-properties fo:break-before="auto" style:column-width="1.917cm"/>
    </style:style>
    <style:style style:name="co13" style:family="table-column">
      <style:table-column-properties fo:break-before="auto" style:column-width="3.798cm"/>
    </style:style>
    <style:style style:name="co14" style:family="table-column">
      <style:table-column-properties fo:break-before="auto" style:column-width="1.238cm"/>
    </style:style>
    <style:style style:name="co15" style:family="table-column">
      <style:table-column-properties fo:break-before="auto" style:column-width="9.495cm"/>
    </style:style>
    <style:style style:name="co16" style:family="table-column">
      <style:table-column-properties fo:break-before="auto" style:column-width="2.258cm"/>
    </style:style>
    <style:style style:name="co17" style:family="table-column">
      <style:table-column-properties fo:break-before="auto" style:column-width="0.474cm"/>
    </style:style>
    <style:style style:name="co18" style:family="table-column">
      <style:table-column-properties fo:break-before="auto" style:column-width="3.531cm"/>
    </style:style>
    <style:style style:name="co19" style:family="table-column">
      <style:table-column-properties fo:break-before="auto" style:column-width="1.175cm"/>
    </style:style>
    <style:style style:name="co20" style:family="table-column">
      <style:table-column-properties fo:break-before="auto" style:column-width="1.875cm"/>
    </style:style>
    <style:style style:name="co21" style:family="table-column">
      <style:table-column-properties fo:break-before="auto" style:column-width="1.769cm"/>
    </style:style>
    <style:style style:name="co22" style:family="table-column">
      <style:table-column-properties fo:break-before="auto" style:column-width="2.173cm"/>
    </style:style>
    <style:style style:name="co23" style:family="table-column">
      <style:table-column-properties fo:break-before="auto" style:column-width="2.152cm"/>
    </style:style>
    <style:style style:name="co24" style:family="table-column">
      <style:table-column-properties fo:break-before="auto" style:column-width="2.596cm"/>
    </style:style>
    <style:style style:name="co25" style:family="table-column">
      <style:table-column-properties fo:break-before="auto" style:column-width="2.3cm"/>
    </style:style>
    <style:style style:name="co26" style:family="table-column">
      <style:table-column-properties fo:break-before="auto" style:column-width="2.491cm"/>
    </style:style>
    <style:style style:name="co27" style:family="table-column">
      <style:table-column-properties fo:break-before="auto" style:column-width="1.579cm"/>
    </style:style>
    <style:style style:name="co28" style:family="table-column">
      <style:table-column-properties fo:break-before="auto" style:column-width="1.429cm"/>
    </style:style>
    <style:style style:name="co29" style:family="table-column">
      <style:table-column-properties fo:break-before="auto" style:column-width="1.494cm"/>
    </style:style>
    <style:style style:name="co30" style:family="table-column">
      <style:table-column-properties fo:break-before="auto" style:column-width="1.536cm"/>
    </style:style>
    <style:style style:name="co31" style:family="table-column">
      <style:table-column-properties fo:break-before="auto" style:column-width="1.471cm"/>
    </style:style>
    <style:style style:name="co32" style:family="table-column">
      <style:table-column-properties fo:break-before="auto" style:column-width="1.79cm"/>
    </style:style>
    <style:style style:name="co33" style:family="table-column">
      <style:table-column-properties fo:break-before="auto" style:column-width="2.427cm"/>
    </style:style>
    <style:style style:name="co34" style:family="table-column">
      <style:table-column-properties fo:break-before="auto" style:column-width="2.406cm"/>
    </style:style>
    <style:style style:name="co35" style:family="table-column">
      <style:table-column-properties fo:break-before="auto" style:column-width="0.517cm"/>
    </style:style>
    <style:style style:name="ro1" style:family="table-row">
      <style:table-row-properties style:row-height="2.54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6" style:family="table-cell" style:parent-style-name="Default" style:data-style-name="N100"/>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2" table:default-cell-style-name="Default"/>
        <table:table-column table:style-name="co2" table:default-cell-style-name="Default"/>
        <table:table-column table:style-name="co11" table:default-cell-style-name="Default"/>
        <table:table-column table:style-name="co1" table:default-cell-style-name="Default"/>
        <table:table-column table:style-name="co12" table:default-cell-style-name="ce11"/>
        <table:table-column table:style-name="co7" table:default-cell-style-name="Default"/>
        <table:table-column table:style-name="co13" table:default-cell-style-name="Default"/>
        <table:table-column table:style-name="co14" table:default-cell-style-name="Default"/>
        <table:table-column table:style-name="co13" table:default-cell-style-name="ce9"/>
        <table:table-column table:style-name="co7" table:default-cell-style-name="Default"/>
        <table:table-column table:style-name="co15" table:default-cell-style-name="Default"/>
        <table:table-column table:style-name="co16" table:number-columns-repeated="16348" table:default-cell-style-name="Default"/>
        <table:table-row table:style-name="ro1">
          <table:table-cell table:style-name="ce15" office:value-type="string" calcext:value-type="string">
            <text:p>テーブル順</text:p>
          </table:table-cell>
          <table:table-cell table:style-name="ce15" office:value-type="string" calcext:value-type="string">
            <text:p>デッキ順</text:p>
          </table:table-cell>
          <table:table-cell table:style-name="ce16" office:value-type="string" calcext:value-type="string">
            <text:p>ID</text:p>
          </table:table-cell>
          <table:table-cell table:style-name="ce18" office:value-type="string" calcext:value-type="string">
            <text:p>ローカルID</text:p>
          </table:table-cell>
          <table:table-cell table:style-name="ce20" office:value-type="string" calcext:value-type="string">
            <text:p>カード名</text:p>
          </table:table-cell>
          <table:table-cell table:style-name="ce20" office:value-type="string" calcext:value-type="string">
            <text:p>読み仮名</text:p>
          </table:table-cell>
          <table:table-cell table:style-name="ce20" office:value-type="string" calcext:value-type="string">
            <text:p>収録</text:p>
          </table:table-cell>
          <table:table-cell table:style-name="ce15" office:value-type="string" calcext:value-type="string">
            <text:p>収録番号</text:p>
          </table:table-cell>
          <table:table-cell table:style-name="ce15" office:value-type="string" calcext:value-type="string">
            <text:p>レアリティ</text:p>
          </table:table-cell>
          <table:table-cell table:style-name="ce15" office:value-type="string" calcext:value-type="string">
            <text:p>レアリティ番号</text:p>
          </table:table-cell>
          <table:table-cell table:style-name="ce20" office:value-type="string" calcext:value-type="string">
            <text:p>種類</text:p>
          </table:table-cell>
          <table:table-cell table:style-name="ce15" office:value-type="string" calcext:value-type="string">
            <text:p>種類番号</text:p>
          </table:table-cell>
          <table:table-cell table:style-name="ce20" office:value-type="string" calcext:value-type="string">
            <text:p>色</text:p>
          </table:table-cell>
          <table:table-cell table:style-name="ce15" office:value-type="string" calcext:value-type="string">
            <text:p>色番号</text:p>
          </table:table-cell>
          <table:table-cell table:style-name="ce15" office:value-type="string" calcext:value-type="string">
            <text:p>レベル</text:p>
          </table:table-cell>
          <table:table-cell table:style-name="ce15" office:value-type="string" calcext:value-type="string">
            <text:p>魔力コスト</text:p>
          </table:table-cell>
          <table:table-cell table:style-name="ce15" office:value-type="string" calcext:value-type="string">
            <text:p>能力語</text:p>
          </table:table-cell>
          <table:table-cell table:style-name="ce15" office:value-type="string" calcext:value-type="string">
            <text:p>能力語番号</text:p>
          </table:table-cell>
          <table:table-cell table:style-name="ce10" office:value-type="string" calcext:value-type="string">
            <text:p>特性</text:p>
          </table:table-cell>
          <table:table-cell table:style-name="ce15" office:value-type="string" calcext:value-type="string">
            <text:p>特性番号</text:p>
          </table:table-cell>
          <table:table-cell table:style-name="ce14" office:value-type="string" calcext:value-type="string">
            <text:p>ルールテキスト</text:p>
          </table:table-cell>
          <table:table-cell table:style-name="ce15" office:value-type="string" calcext:value-type="string">
            <text:p>パワー</text:p>
          </table:table-cell>
          <table:table-cell table:style-name="ce15" office:value-type="string" calcext:value-type="string">
            <text:p>遺業能力</text:p>
          </table:table-cell>
          <table:table-cell table:style-name="ce15" office:value-type="string" calcext:value-type="string">
            <text:p>遺業能力番号</text:p>
          </table:table-cell>
          <table:table-cell office:value-type="string" calcext:value-type="string">
            <text:p>画像URL</text:p>
          </table:table-cell>
          <table:table-cell table:style-name="ce20" office:value-type="string" calcext:value-type="string">
            <text:p>JSON</text:p>
          </table:table-cell>
          <table:table-cell table:style-name="ce20"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G2];[$収録番号.$A$1:$収録番号.$B$9];2;0)" office:value-type="float" office:value="10" calcext:value-type="float">
            <text:p>10</text:p>
          </table:table-cell>
          <table:table-cell office:value-type="string" calcext:value-type="string">
            <text:p>SR</text:p>
          </table:table-cell>
          <table:table-cell table:formula="of:=VLOOKUP([.I2];[$レアリティ番号.$A$1:$レアリティ番号.$B$4];2;0)" office:value-type="float" office:value="4" calcext:value-type="float">
            <text:p>4</text:p>
          </table:table-cell>
          <table:table-cell office:value-type="string" calcext:value-type="string">
            <text:p>イジン</text:p>
          </table:table-cell>
          <table:table-cell table:formula="of:=VLOOKUP([.K2];[$種類番号.$A$1:$種類番号.$B$4];2;0)" office:value-type="float" office:value="1" calcext:value-type="float">
            <text:p>1</text:p>
          </table:table-cell>
          <table:table-cell office:value-type="string" calcext:value-type="string">
            <text:p>赤</text:p>
          </table:table-cell>
          <table:table-cell table:formula="of:=VLOOKUP([.M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能力語番号.$A$1:$能力語番号.$B$10];2;0);0)" office:value-type="float" office:value="0" calcext:value-type="float">
            <text:p>0</text:p>
          </table:table-cell>
          <table:table-cell office:value-type="string" calcext:value-type="string">
            <text:p>剣術</text:p>
          </table:table-cell>
          <table:table-cell table:formula="of:=IFERROR(VLOOKUP([.$S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office:value-type="float" office:value="6000" calcext:value-type="float">
            <text:p>6000</text:p>
          </table:table-cell>
          <table:table-cell table:style-name="ce8" table:formula="of:=NA()" office:value-type="string" office:string-value="" calcext:value-type="error">
            <text:p>#N/A</text:p>
          </table:table-cell>
          <table:table-cell table:formula="of:=IFERROR(VLOOKUP([.$W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IF(ISNA([.$S2]);&quot;null&quot;;&quot;&quot;&quot;&quot;&amp;[.$S2]&amp;&quot;&quot;&quot;&quot;);[$JSON.$E$1];[.$U2];[$JSON.$F$1];IF(ISNA([.$W2]);&quot;null&quot;;&quot;&quot;&quot;&quot;&amp;[.$W2]&amp;&quot;&quot;&quot;&quot;);[$JSON.$G$1];[.$Y2];[$JSON.$H$1];[.$H2];[$JSON.$I$1];[.J2];[$JSON.$J$1];[.$L2];[$JSON.$K$1];[.$O2];[$JSON.$L$1];[.$N2];[$JSON.$M$1];[.$R2];[$JSON.$N$1];[.$T2];[$JSON.$O$1];IF(ISNA([.$V2]);&quot;null&quot;;[.$V2]);[$JSON.$P$1];[.$X2];[$JSON.$Q$1];[.$A2];[$JSON.$R$1];[.$B2];[$JSON.$S$1])" office:value-type="string" office:string-value="{&quot;id&quot;:&quot;R-1&quot;,&quot;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orderTable&quot;:1,&quot;orderDeck&quot;:180}," calcext:value-type="string">
            <text:p>{"id":"R-1","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G3];[$収録番号.$A$1:$収録番号.$B$9];2;0)" office:value-type="float" office:value="10" calcext:value-type="float">
            <text:p>10</text:p>
          </table:table-cell>
          <table:table-cell office:value-type="string" calcext:value-type="string">
            <text:p>N</text:p>
          </table:table-cell>
          <table:table-cell table:formula="of:=VLOOKUP([.I3];[$レアリティ番号.$A$1:$レアリティ番号.$B$4];2;0)" office:value-type="float" office:value="1" calcext:value-type="float">
            <text:p>1</text:p>
          </table:table-cell>
          <table:table-cell office:value-type="string" calcext:value-type="string">
            <text:p>イジン</text:p>
          </table:table-cell>
          <table:table-cell table:formula="of:=VLOOKUP([.K3];[$種類番号.$A$1:$種類番号.$B$4];2;0)" office:value-type="float" office:value="1" calcext:value-type="float">
            <text:p>1</text:p>
          </table:table-cell>
          <table:table-cell office:value-type="string" calcext:value-type="string">
            <text:p>赤</text:p>
          </table:table-cell>
          <table:table-cell table:formula="of:=VLOOKUP([.M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能力語番号.$A$1:$能力語番号.$B$10];2;0);0)" office:value-type="float" office:value="0" calcext:value-type="float">
            <text:p>0</text:p>
          </table:table-cell>
          <table:table-cell office:value-type="string" calcext:value-type="string">
            <text:p>剣術</text:p>
          </table:table-cell>
          <table:table-cell table:formula="of:=IFERROR(VLOOKUP([.$S3];[$特性番号.$A$1:$特性番号.$B$8];2;0);0)" office:value-type="float" office:value="1" calcext:value-type="float">
            <text:p>1</text:p>
          </table:table-cell>
          <table:table-cell office:value-type="string" calcext:value-type="string">
            <text:p>即応</text:p>
          </table:table-cell>
          <table:table-cell office:value-type="float" office:value="500" calcext:value-type="float">
            <text:p>500</text:p>
          </table:table-cell>
          <table:table-cell table:style-name="ce8" office:value-type="string" calcext:value-type="string">
            <text:p>魔力化</text:p>
          </table:table-cell>
          <table:table-cell table:formula="of:=IFERROR(VLOOKUP([.$W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IF(ISNA([.$S3]);&quot;null&quot;;&quot;&quot;&quot;&quot;&amp;[.$S3]&amp;&quot;&quot;&quot;&quot;);[$JSON.$E$1];[.$U3];[$JSON.$F$1];IF(ISNA([.$W3]);&quot;null&quot;;&quot;&quot;&quot;&quot;&amp;[.$W3]&amp;&quot;&quot;&quot;&quot;);[$JSON.$G$1];[.$Y3];[$JSON.$H$1];[.$H3];[$JSON.$I$1];[.J3];[$JSON.$J$1];[.$L3];[$JSON.$K$1];[.$O3];[$JSON.$L$1];[.$N3];[$JSON.$M$1];[.$R3];[$JSON.$N$1];[.$T3];[$JSON.$O$1];IF(ISNA([.$V3]);&quot;null&quot;;[.$V3]);[$JSON.$P$1];[.$X3];[$JSON.$Q$1];[.$A3];[$JSON.$R$1];[.$B3];[$JSON.$S$1])" office:value-type="string" office:string-value="{&quot;id&quot;:&quot;R-2&quot;,&quot;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orderTable&quot;:2,&quot;orderDeck&quot;:1}," calcext:value-type="string">
            <text:p>{"id":"R-2","name":"源義経","kana":"みなもとのよしつね","traitText":"剣術","ruleText":"即応","legacyText":"魔力化","imageUrl":"https://one-draw.jp/ijinden/cardlist/R01/card/R_002.png","expansion":10,"rarity":1,"type":1,"level":1,"color":1,"term":0,"trait":1,"power":500,"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G4];[$収録番号.$A$1:$収録番号.$B$9];2;0)" office:value-type="float" office:value="10" calcext:value-type="float">
            <text:p>10</text:p>
          </table:table-cell>
          <table:table-cell office:value-type="string" calcext:value-type="string">
            <text:p>N</text:p>
          </table:table-cell>
          <table:table-cell table:formula="of:=VLOOKUP([.I4];[$レアリティ番号.$A$1:$レアリティ番号.$B$4];2;0)" office:value-type="float" office:value="1" calcext:value-type="float">
            <text:p>1</text:p>
          </table:table-cell>
          <table:table-cell office:value-type="string" calcext:value-type="string">
            <text:p>イジン</text:p>
          </table:table-cell>
          <table:table-cell table:formula="of:=VLOOKUP([.K4];[$種類番号.$A$1:$種類番号.$B$4];2;0)" office:value-type="float" office:value="1" calcext:value-type="float">
            <text:p>1</text:p>
          </table:table-cell>
          <table:table-cell office:value-type="string" calcext:value-type="string">
            <text:p>赤</text:p>
          </table:table-cell>
          <table:table-cell table:formula="of:=VLOOKUP([.M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能力語番号.$A$1:$能力語番号.$B$10];2;0);0)" office:value-type="float" office:value="0" calcext:value-type="float">
            <text:p>0</text:p>
          </table:table-cell>
          <table:table-cell office:value-type="string" calcext:value-type="string">
            <text:p>剣術</text:p>
          </table:table-cell>
          <table:table-cell table:formula="of:=IFERROR(VLOOKUP([.$S4];[$特性番号.$A$1:$特性番号.$B$8];2;0);0)" office:value-type="float" office:value="1" calcext:value-type="float">
            <text:p>1</text:p>
          </table:table-cell>
          <table:table-cell office:value-type="string" calcext:value-type="string">
            <text:p>アタック+2000</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IF(ISNA([.$S4]);&quot;null&quot;;&quot;&quot;&quot;&quot;&amp;[.$S4]&amp;&quot;&quot;&quot;&quot;);[$JSON.$E$1];[.$U4];[$JSON.$F$1];IF(ISNA([.$W4]);&quot;null&quot;;&quot;&quot;&quot;&quot;&amp;[.$W4]&amp;&quot;&quot;&quot;&quot;);[$JSON.$G$1];[.$Y4];[$JSON.$H$1];[.$H4];[$JSON.$I$1];[.J4];[$JSON.$J$1];[.$L4];[$JSON.$K$1];[.$O4];[$JSON.$L$1];[.$N4];[$JSON.$M$1];[.$R4];[$JSON.$N$1];[.$T4];[$JSON.$O$1];IF(ISNA([.$V4]);&quot;null&quot;;[.$V4]);[$JSON.$P$1];[.$X4];[$JSON.$Q$1];[.$A4];[$JSON.$R$1];[.$B4];[$JSON.$S$1])" office:value-type="string" office:string-value="{&quot;id&quot;:&quot;R-3&quot;,&quot;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orderTable&quot;:3,&quot;orderDeck&quot;:24}," calcext:value-type="string">
            <text:p>{"id":"R-3","name":"武田勝頼","kana":"たけだかつより","traitText":"剣術","ruleText":"アタック+2000","legacyText":"1ドローする","imageUrl":"https://one-draw.jp/ijinden/cardlist/R01/card/R_003.png","expansion":10,"rarity":1,"type":1,"level":2,"color":1,"term":0,"trait":1,"power":1000,"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G5];[$収録番号.$A$1:$収録番号.$B$9];2;0)" office:value-type="float" office:value="10" calcext:value-type="float">
            <text:p>10</text:p>
          </table:table-cell>
          <table:table-cell office:value-type="string" calcext:value-type="string">
            <text:p>N</text:p>
          </table:table-cell>
          <table:table-cell table:formula="of:=VLOOKUP([.I5];[$レアリティ番号.$A$1:$レアリティ番号.$B$4];2;0)" office:value-type="float" office:value="1" calcext:value-type="float">
            <text:p>1</text:p>
          </table:table-cell>
          <table:table-cell office:value-type="string" calcext:value-type="string">
            <text:p>イジン</text:p>
          </table:table-cell>
          <table:table-cell table:formula="of:=VLOOKUP([.K5];[$種類番号.$A$1:$種類番号.$B$4];2;0)" office:value-type="float" office:value="1" calcext:value-type="float">
            <text:p>1</text:p>
          </table:table-cell>
          <table:table-cell office:value-type="string" calcext:value-type="string">
            <text:p>赤</text:p>
          </table:table-cell>
          <table:table-cell table:formula="of:=VLOOKUP([.M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IF(ISNA([.$S5]);&quot;null&quot;;&quot;&quot;&quot;&quot;&amp;[.$S5]&amp;&quot;&quot;&quot;&quot;);[$JSON.$E$1];[.$U5];[$JSON.$F$1];IF(ISNA([.$W5]);&quot;null&quot;;&quot;&quot;&quot;&quot;&amp;[.$W5]&amp;&quot;&quot;&quot;&quot;);[$JSON.$G$1];[.$Y5];[$JSON.$H$1];[.$H5];[$JSON.$I$1];[.J5];[$JSON.$J$1];[.$L5];[$JSON.$K$1];[.$O5];[$JSON.$L$1];[.$N5];[$JSON.$M$1];[.$R5];[$JSON.$N$1];[.$T5];[$JSON.$O$1];IF(ISNA([.$V5]);&quot;null&quot;;[.$V5]);[$JSON.$P$1];[.$X5];[$JSON.$Q$1];[.$A5];[$JSON.$R$1];[.$B5];[$JSON.$S$1])" office:value-type="string" office:string-value="{&quot;id&quot;:&quot;R-4&quot;,&quot;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orderTable&quot;:4,&quot;orderDeck&quot;:63}," calcext:value-type="string">
            <text:p>{"id":"R-4","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G6];[$収録番号.$A$1:$収録番号.$B$9];2;0)" office:value-type="float" office:value="10" calcext:value-type="float">
            <text:p>10</text:p>
          </table:table-cell>
          <table:table-cell office:value-type="string" calcext:value-type="string">
            <text:p>N</text:p>
          </table:table-cell>
          <table:table-cell table:formula="of:=VLOOKUP([.I6];[$レアリティ番号.$A$1:$レアリティ番号.$B$4];2;0)" office:value-type="float" office:value="1" calcext:value-type="float">
            <text:p>1</text:p>
          </table:table-cell>
          <table:table-cell office:value-type="string" calcext:value-type="string">
            <text:p>イジン</text:p>
          </table:table-cell>
          <table:table-cell table:formula="of:=VLOOKUP([.K6];[$種類番号.$A$1:$種類番号.$B$4];2;0)" office:value-type="float" office:value="1" calcext:value-type="float">
            <text:p>1</text:p>
          </table:table-cell>
          <table:table-cell office:value-type="string" calcext:value-type="string">
            <text:p>赤</text:p>
          </table:table-cell>
          <table:table-cell table:formula="of:=VLOOKUP([.M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能力語番号.$A$1:$能力語番号.$B$10];2;0);0)" office:value-type="float" office:value="0" calcext:value-type="float">
            <text:p>0</text:p>
          </table:table-cell>
          <table:table-cell office:value-type="string" calcext:value-type="string">
            <text:p>剣術</text:p>
          </table:table-cell>
          <table:table-cell table:formula="of:=IFERROR(VLOOKUP([.$S6];[$特性番号.$A$1:$特性番号.$B$8];2;0);0)" office:value-type="float" office:value="1" calcext:value-type="float">
            <text:p>1</text:p>
          </table:table-cell>
          <table:table-cell office:value-type="string" calcext:value-type="string">
            <text:p>ダブルプレッシャー</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IF(ISNA([.$S6]);&quot;null&quot;;&quot;&quot;&quot;&quot;&amp;[.$S6]&amp;&quot;&quot;&quot;&quot;);[$JSON.$E$1];[.$U6];[$JSON.$F$1];IF(ISNA([.$W6]);&quot;null&quot;;&quot;&quot;&quot;&quot;&amp;[.$W6]&amp;&quot;&quot;&quot;&quot;);[$JSON.$G$1];[.$Y6];[$JSON.$H$1];[.$H6];[$JSON.$I$1];[.J6];[$JSON.$J$1];[.$L6];[$JSON.$K$1];[.$O6];[$JSON.$L$1];[.$N6];[$JSON.$M$1];[.$R6];[$JSON.$N$1];[.$T6];[$JSON.$O$1];IF(ISNA([.$V6]);&quot;null&quot;;[.$V6]);[$JSON.$P$1];[.$X6];[$JSON.$Q$1];[.$A6];[$JSON.$R$1];[.$B6];[$JSON.$S$1])" office:value-type="string" office:string-value="{&quot;id&quot;:&quot;R-5&quot;,&quot;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orderTable&quot;:5,&quot;orderDeck&quot;:106}," calcext:value-type="string">
            <text:p>{"id":"R-5","name":"坂上田村麻呂","kana":"さかのうえのたむらまろ","traitText":"剣術","ruleText":"ダブルプレッシャー","legacyText":null,"imageUrl":"https://one-draw.jp/ijinden/cardlist/R01/card/R_005.png","expansion":10,"rarity":1,"type":1,"level":4,"color":1,"term":0,"trait":1,"power":1000,"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G7];[$収録番号.$A$1:$収録番号.$B$9];2;0)" office:value-type="float" office:value="10" calcext:value-type="float">
            <text:p>10</text:p>
          </table:table-cell>
          <table:table-cell office:value-type="string" calcext:value-type="string">
            <text:p>N</text:p>
          </table:table-cell>
          <table:table-cell table:formula="of:=VLOOKUP([.I7];[$レアリティ番号.$A$1:$レアリティ番号.$B$4];2;0)" office:value-type="float" office:value="1" calcext:value-type="float">
            <text:p>1</text:p>
          </table:table-cell>
          <table:table-cell office:value-type="string" calcext:value-type="string">
            <text:p>イジン</text:p>
          </table:table-cell>
          <table:table-cell table:formula="of:=VLOOKUP([.K7];[$種類番号.$A$1:$種類番号.$B$4];2;0)" office:value-type="float" office:value="1" calcext:value-type="float">
            <text:p>1</text:p>
          </table:table-cell>
          <table:table-cell office:value-type="string" calcext:value-type="string">
            <text:p>赤</text:p>
          </table:table-cell>
          <table:table-cell table:formula="of:=VLOOKUP([.M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能力語番号.$A$1:$能力語番号.$B$10];2;0);0)" office:value-type="float" office:value="0" calcext:value-type="float">
            <text:p>0</text:p>
          </table:table-cell>
          <table:table-cell office:value-type="string" calcext:value-type="string">
            <text:p>剣術</text:p>
          </table:table-cell>
          <table:table-cell table:formula="of:=IFERROR(VLOOKUP([.$S7];[$特性番号.$A$1:$特性番号.$B$8];2;0);0)" office:value-type="float" office:value="1" calcext:value-type="float">
            <text:p>1</text:p>
          </table:table-cell>
          <table:table-cell office:value-type="string" calcext:value-type="string">
            <text:p>戦場に置かれたとき、イジン召喚権+1す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IF(ISNA([.$S7]);&quot;null&quot;;&quot;&quot;&quot;&quot;&amp;[.$S7]&amp;&quot;&quot;&quot;&quot;);[$JSON.$E$1];[.$U7];[$JSON.$F$1];IF(ISNA([.$W7]);&quot;null&quot;;&quot;&quot;&quot;&quot;&amp;[.$W7]&amp;&quot;&quot;&quot;&quot;);[$JSON.$G$1];[.$Y7];[$JSON.$H$1];[.$H7];[$JSON.$I$1];[.J7];[$JSON.$J$1];[.$L7];[$JSON.$K$1];[.$O7];[$JSON.$L$1];[.$N7];[$JSON.$M$1];[.$R7];[$JSON.$N$1];[.$T7];[$JSON.$O$1];IF(ISNA([.$V7]);&quot;null&quot;;[.$V7]);[$JSON.$P$1];[.$X7];[$JSON.$Q$1];[.$A7];[$JSON.$R$1];[.$B7];[$JSON.$S$1])" office:value-type="string" office:string-value="{&quot;id&quot;:&quot;R-6&quot;,&quot;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orderTable&quot;:6,&quot;orderDeck&quot;:143}," calcext:value-type="string">
            <text:p>{"id":"R-6","name":"楠木正成","kana":"くすのきまさしげ","traitText":"剣術","ruleText":"戦場に置かれたとき、イジン召喚権+1する。","legacyText":null,"imageUrl":"https://one-draw.jp/ijinden/cardlist/R01/card/R_006.png","expansion":10,"rarity":1,"type":1,"level":5,"color":1,"term":0,"trait":1,"power":5000,"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G8];[$収録番号.$A$1:$収録番号.$B$9];2;0)" office:value-type="float" office:value="10" calcext:value-type="float">
            <text:p>10</text:p>
          </table:table-cell>
          <table:table-cell office:value-type="string" calcext:value-type="string">
            <text:p>N</text:p>
          </table:table-cell>
          <table:table-cell table:formula="of:=VLOOKUP([.I8];[$レアリティ番号.$A$1:$レアリティ番号.$B$4];2;0)" office:value-type="float" office:value="1" calcext:value-type="float">
            <text:p>1</text:p>
          </table:table-cell>
          <table:table-cell office:value-type="string" calcext:value-type="string">
            <text:p>イジン</text:p>
          </table:table-cell>
          <table:table-cell table:formula="of:=VLOOKUP([.K8];[$種類番号.$A$1:$種類番号.$B$4];2;0)" office:value-type="float" office:value="1" calcext:value-type="float">
            <text:p>1</text:p>
          </table:table-cell>
          <table:table-cell office:value-type="string" calcext:value-type="string">
            <text:p>赤</text:p>
          </table:table-cell>
          <table:table-cell table:formula="of:=VLOOKUP([.M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IF(ISNA([.$S8]);&quot;null&quot;;&quot;&quot;&quot;&quot;&amp;[.$S8]&amp;&quot;&quot;&quot;&quot;);[$JSON.$E$1];[.$U8];[$JSON.$F$1];IF(ISNA([.$W8]);&quot;null&quot;;&quot;&quot;&quot;&quot;&amp;[.$W8]&amp;&quot;&quot;&quot;&quot;);[$JSON.$G$1];[.$Y8];[$JSON.$H$1];[.$H8];[$JSON.$I$1];[.J8];[$JSON.$J$1];[.$L8];[$JSON.$K$1];[.$O8];[$JSON.$L$1];[.$N8];[$JSON.$M$1];[.$R8];[$JSON.$N$1];[.$T8];[$JSON.$O$1];IF(ISNA([.$V8]);&quot;null&quot;;[.$V8]);[$JSON.$P$1];[.$X8];[$JSON.$Q$1];[.$A8];[$JSON.$R$1];[.$B8];[$JSON.$S$1])" office:value-type="string" office:string-value="{&quot;id&quot;:&quot;R-7&quot;,&quot;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orderTable&quot;:7,&quot;orderDeck&quot;:144}," calcext:value-type="string">
            <text:p>{"id":"R-7","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G9];[$収録番号.$A$1:$収録番号.$B$9];2;0)" office:value-type="float" office:value="10" calcext:value-type="float">
            <text:p>10</text:p>
          </table:table-cell>
          <table:table-cell office:value-type="string" calcext:value-type="string">
            <text:p>N</text:p>
          </table:table-cell>
          <table:table-cell table:formula="of:=VLOOKUP([.I9];[$レアリティ番号.$A$1:$レアリティ番号.$B$4];2;0)" office:value-type="float" office:value="1" calcext:value-type="float">
            <text:p>1</text:p>
          </table:table-cell>
          <table:table-cell office:value-type="string" calcext:value-type="string">
            <text:p>イジン</text:p>
          </table:table-cell>
          <table:table-cell table:formula="of:=VLOOKUP([.K9];[$種類番号.$A$1:$種類番号.$B$4];2;0)" office:value-type="float" office:value="1" calcext:value-type="float">
            <text:p>1</text:p>
          </table:table-cell>
          <table:table-cell office:value-type="string" calcext:value-type="string">
            <text:p>赤</text:p>
          </table:table-cell>
          <table:table-cell table:formula="of:=VLOOKUP([.M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office:value-type="float" office:value="6000" calcext:value-type="float">
            <text:p>6000</text:p>
          </table:table-cell>
          <table:table-cell table:style-name="ce8" table:formula="of:=NA()" office:value-type="string" office:string-value="" calcext:value-type="error">
            <text:p>#N/A</text:p>
          </table:table-cell>
          <table:table-cell table:formula="of:=IFERROR(VLOOKUP([.$W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IF(ISNA([.$S9]);&quot;null&quot;;&quot;&quot;&quot;&quot;&amp;[.$S9]&amp;&quot;&quot;&quot;&quot;);[$JSON.$E$1];[.$U9];[$JSON.$F$1];IF(ISNA([.$W9]);&quot;null&quot;;&quot;&quot;&quot;&quot;&amp;[.$W9]&amp;&quot;&quot;&quot;&quot;);[$JSON.$G$1];[.$Y9];[$JSON.$H$1];[.$H9];[$JSON.$I$1];[.J9];[$JSON.$J$1];[.$L9];[$JSON.$K$1];[.$O9];[$JSON.$L$1];[.$N9];[$JSON.$M$1];[.$R9];[$JSON.$N$1];[.$T9];[$JSON.$O$1];IF(ISNA([.$V9]);&quot;null&quot;;[.$V9]);[$JSON.$P$1];[.$X9];[$JSON.$Q$1];[.$A9];[$JSON.$R$1];[.$B9];[$JSON.$S$1])" office:value-type="string" office:string-value="{&quot;id&quot;:&quot;R-8&quot;,&quot;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orderTable&quot;:8,&quot;orderDeck&quot;:181}," calcext:value-type="string">
            <text:p>{"id":"R-8","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G10];[$収録番号.$A$1:$収録番号.$B$9];2;0)" office:value-type="float" office:value="10" calcext:value-type="float">
            <text:p>10</text:p>
          </table:table-cell>
          <table:table-cell office:value-type="string" calcext:value-type="string">
            <text:p>N</text:p>
          </table:table-cell>
          <table:table-cell table:formula="of:=VLOOKUP([.I10];[$レアリティ番号.$A$1:$レアリティ番号.$B$4];2;0)" office:value-type="float" office:value="1" calcext:value-type="float">
            <text:p>1</text:p>
          </table:table-cell>
          <table:table-cell office:value-type="string" calcext:value-type="string">
            <text:p>ハイケイ</text:p>
          </table:table-cell>
          <table:table-cell table:formula="of:=VLOOKUP([.K10];[$種類番号.$A$1:$種類番号.$B$4];2;0)" office:value-type="float" office:value="2" calcext:value-type="float">
            <text:p>2</text:p>
          </table:table-cell>
          <table:table-cell office:value-type="string" calcext:value-type="string">
            <text:p>赤</text:p>
          </table:table-cell>
          <table:table-cell table:formula="of:=VLOOKUP([.M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IF(ISNA([.$S10]);&quot;null&quot;;&quot;&quot;&quot;&quot;&amp;[.$S10]&amp;&quot;&quot;&quot;&quot;);[$JSON.$E$1];[.$U10];[$JSON.$F$1];IF(ISNA([.$W10]);&quot;null&quot;;&quot;&quot;&quot;&quot;&amp;[.$W10]&amp;&quot;&quot;&quot;&quot;);[$JSON.$G$1];[.$Y10];[$JSON.$H$1];[.$H10];[$JSON.$I$1];[.J10];[$JSON.$J$1];[.$L10];[$JSON.$K$1];[.$O10];[$JSON.$L$1];[.$N10];[$JSON.$M$1];[.$R10];[$JSON.$N$1];[.$T10];[$JSON.$O$1];IF(ISNA([.$V10]);&quot;null&quot;;[.$V10]);[$JSON.$P$1];[.$X10];[$JSON.$Q$1];[.$A10];[$JSON.$R$1];[.$B10];[$JSON.$S$1])" office:value-type="string" office:string-value="{&quot;id&quot;:&quot;R-9&quot;,&quot;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orderTable&quot;:9,&quot;orderDeck&quot;:239}," calcext:value-type="string">
            <text:p>{"id":"R-9","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G11];[$収録番号.$A$1:$収録番号.$B$9];2;0)" office:value-type="float" office:value="10" calcext:value-type="float">
            <text:p>10</text:p>
          </table:table-cell>
          <table:table-cell office:value-type="string" calcext:value-type="string">
            <text:p>N</text:p>
          </table:table-cell>
          <table:table-cell table:formula="of:=VLOOKUP([.I11];[$レアリティ番号.$A$1:$レアリティ番号.$B$4];2;0)" office:value-type="float" office:value="1" calcext:value-type="float">
            <text:p>1</text:p>
          </table:table-cell>
          <table:table-cell office:value-type="string" calcext:value-type="string">
            <text:p>ハイケイ</text:p>
          </table:table-cell>
          <table:table-cell table:formula="of:=VLOOKUP([.K11];[$種類番号.$A$1:$種類番号.$B$4];2;0)" office:value-type="float" office:value="2" calcext:value-type="float">
            <text:p>2</text:p>
          </table:table-cell>
          <table:table-cell office:value-type="string" calcext:value-type="string">
            <text:p>赤</text:p>
          </table:table-cell>
          <table:table-cell table:formula="of:=VLOOKUP([.M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IF(ISNA([.$S11]);&quot;null&quot;;&quot;&quot;&quot;&quot;&amp;[.$S11]&amp;&quot;&quot;&quot;&quot;);[$JSON.$E$1];[.$U11];[$JSON.$F$1];IF(ISNA([.$W11]);&quot;null&quot;;&quot;&quot;&quot;&quot;&amp;[.$W11]&amp;&quot;&quot;&quot;&quot;);[$JSON.$G$1];[.$Y11];[$JSON.$H$1];[.$H11];[$JSON.$I$1];[.J11];[$JSON.$J$1];[.$L11];[$JSON.$K$1];[.$O11];[$JSON.$L$1];[.$N11];[$JSON.$M$1];[.$R11];[$JSON.$N$1];[.$T11];[$JSON.$O$1];IF(ISNA([.$V11]);&quot;null&quot;;[.$V11]);[$JSON.$P$1];[.$X11];[$JSON.$Q$1];[.$A11];[$JSON.$R$1];[.$B11];[$JSON.$S$1])" office:value-type="string" office:string-value="{&quot;id&quot;:&quot;R-10&quot;,&quot;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orderTable&quot;:10,&quot;orderDeck&quot;:248}," calcext:value-type="string">
            <text:p>{"id":"R-10","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G12];[$収録番号.$A$1:$収録番号.$B$9];2;0)" office:value-type="float" office:value="10" calcext:value-type="float">
            <text:p>10</text:p>
          </table:table-cell>
          <table:table-cell office:value-type="string" calcext:value-type="string">
            <text:p>N</text:p>
          </table:table-cell>
          <table:table-cell table:formula="of:=VLOOKUP([.I12];[$レアリティ番号.$A$1:$レアリティ番号.$B$4];2;0)" office:value-type="float" office:value="1" calcext:value-type="float">
            <text:p>1</text:p>
          </table:table-cell>
          <table:table-cell office:value-type="string" calcext:value-type="string">
            <text:p>マホウ</text:p>
          </table:table-cell>
          <table:table-cell table:formula="of:=VLOOKUP([.K12];[$種類番号.$A$1:$種類番号.$B$4];2;0)" office:value-type="float" office:value="3" calcext:value-type="float">
            <text:p>3</text:p>
          </table:table-cell>
          <table:table-cell office:value-type="string" calcext:value-type="string">
            <text:p>赤</text:p>
          </table:table-cell>
          <table:table-cell table:formula="of:=VLOOKUP([.M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IF(ISNA([.$S12]);&quot;null&quot;;&quot;&quot;&quot;&quot;&amp;[.$S12]&amp;&quot;&quot;&quot;&quot;);[$JSON.$E$1];[.$U12];[$JSON.$F$1];IF(ISNA([.$W12]);&quot;null&quot;;&quot;&quot;&quot;&quot;&amp;[.$W12]&amp;&quot;&quot;&quot;&quot;);[$JSON.$G$1];[.$Y12];[$JSON.$H$1];[.$H12];[$JSON.$I$1];[.J12];[$JSON.$J$1];[.$L12];[$JSON.$K$1];[.$O12];[$JSON.$L$1];[.$N12];[$JSON.$M$1];[.$R12];[$JSON.$N$1];[.$T12];[$JSON.$O$1];IF(ISNA([.$V12]);&quot;null&quot;;[.$V12]);[$JSON.$P$1];[.$X12];[$JSON.$Q$1];[.$A12];[$JSON.$R$1];[.$B12];[$JSON.$S$1])" office:value-type="string" office:string-value="{&quot;id&quot;:&quot;R-11&quot;,&quot;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orderTable&quot;:11,&quot;orderDeck&quot;:304}," calcext:value-type="string">
            <text:p>{"id":"R-11","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G13];[$収録番号.$A$1:$収録番号.$B$9];2;0)" office:value-type="float" office:value="10" calcext:value-type="float">
            <text:p>10</text:p>
          </table:table-cell>
          <table:table-cell office:value-type="string" calcext:value-type="string">
            <text:p>N</text:p>
          </table:table-cell>
          <table:table-cell table:formula="of:=VLOOKUP([.I13];[$レアリティ番号.$A$1:$レアリティ番号.$B$4];2;0)" office:value-type="float" office:value="1" calcext:value-type="float">
            <text:p>1</text:p>
          </table:table-cell>
          <table:table-cell office:value-type="string" calcext:value-type="string">
            <text:p>マホウ</text:p>
          </table:table-cell>
          <table:table-cell table:formula="of:=VLOOKUP([.K13];[$種類番号.$A$1:$種類番号.$B$4];2;0)" office:value-type="float" office:value="3" calcext:value-type="float">
            <text:p>3</text:p>
          </table:table-cell>
          <table:table-cell office:value-type="string" calcext:value-type="string">
            <text:p>赤</text:p>
          </table:table-cell>
          <table:table-cell table:formula="of:=VLOOKUP([.M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IF(ISNA([.$S13]);&quot;null&quot;;&quot;&quot;&quot;&quot;&amp;[.$S13]&amp;&quot;&quot;&quot;&quot;);[$JSON.$E$1];[.$U13];[$JSON.$F$1];IF(ISNA([.$W13]);&quot;null&quot;;&quot;&quot;&quot;&quot;&amp;[.$W13]&amp;&quot;&quot;&quot;&quot;);[$JSON.$G$1];[.$Y13];[$JSON.$H$1];[.$H13];[$JSON.$I$1];[.J13];[$JSON.$J$1];[.$L13];[$JSON.$K$1];[.$O13];[$JSON.$L$1];[.$N13];[$JSON.$M$1];[.$R13];[$JSON.$N$1];[.$T13];[$JSON.$O$1];IF(ISNA([.$V13]);&quot;null&quot;;[.$V13]);[$JSON.$P$1];[.$X13];[$JSON.$Q$1];[.$A13];[$JSON.$R$1];[.$B13];[$JSON.$S$1])" office:value-type="string" office:string-value="{&quot;id&quot;:&quot;R-12&quot;,&quot;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orderTable&quot;:12,&quot;orderDeck&quot;:305}," calcext:value-type="string">
            <text:p>{"id":"R-12","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G14];[$収録番号.$A$1:$収録番号.$B$9];2;0)" office:value-type="float" office:value="10" calcext:value-type="float">
            <text:p>10</text:p>
          </table:table-cell>
          <table:table-cell office:value-type="string" calcext:value-type="string">
            <text:p>N</text:p>
          </table:table-cell>
          <table:table-cell table:formula="of:=VLOOKUP([.I14];[$レアリティ番号.$A$1:$レアリティ番号.$B$4];2;0)" office:value-type="float" office:value="1" calcext:value-type="float">
            <text:p>1</text:p>
          </table:table-cell>
          <table:table-cell office:value-type="string" calcext:value-type="string">
            <text:p>マリョク</text:p>
          </table:table-cell>
          <table:table-cell table:formula="of:=VLOOKUP([.K14];[$種類番号.$A$1:$種類番号.$B$4];2;0)" office:value-type="float" office:value="4" calcext:value-type="float">
            <text:p>4</text:p>
          </table:table-cell>
          <table:table-cell office:value-type="string" calcext:value-type="string">
            <text:p>赤</text:p>
          </table:table-cell>
          <table:table-cell table:formula="of:=VLOOKUP([.M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IF(ISNA([.$S14]);&quot;null&quot;;&quot;&quot;&quot;&quot;&amp;[.$S14]&amp;&quot;&quot;&quot;&quot;);[$JSON.$E$1];[.$U14];[$JSON.$F$1];IF(ISNA([.$W14]);&quot;null&quot;;&quot;&quot;&quot;&quot;&amp;[.$W14]&amp;&quot;&quot;&quot;&quot;);[$JSON.$G$1];[.$Y14];[$JSON.$H$1];[.$H14];[$JSON.$I$1];[.J14];[$JSON.$J$1];[.$L14];[$JSON.$K$1];[.$O14];[$JSON.$L$1];[.$N14];[$JSON.$M$1];[.$R14];[$JSON.$N$1];[.$T14];[$JSON.$O$1];IF(ISNA([.$V14]);&quot;null&quot;;[.$V14]);[$JSON.$P$1];[.$X14];[$JSON.$Q$1];[.$A14];[$JSON.$R$1];[.$B14];[$JSON.$S$1])" office:value-type="string" office:string-value="{&quot;id&quot;:&quot;R-13&quot;,&quot;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orderTable&quot;:13,&quot;orderDeck&quot;:343}," calcext:value-type="string">
            <text:p>{"id":"R-13","name":"レッドストーン","kana":"れっどすとーん","traitText":null,"ruleText":"※デッキに何枚でも入れてよい。","legacyText":"復元","imageUrl":"https://one-draw.jp/ijinden/cardlist/R01/card/R_013.png","expansion":10,"rarity":1,"type":4,"level":1,"color":1,"term":0,"trait":0,"power":null,"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G15];[$収録番号.$A$1:$収録番号.$B$9];2;0)" office:value-type="float" office:value="11" calcext:value-type="float">
            <text:p>11</text:p>
          </table:table-cell>
          <table:table-cell office:value-type="string" calcext:value-type="string">
            <text:p>SR</text:p>
          </table:table-cell>
          <table:table-cell table:formula="of:=VLOOKUP([.I15];[$レアリティ番号.$A$1:$レアリティ番号.$B$4];2;0)" office:value-type="float" office:value="4" calcext:value-type="float">
            <text:p>4</text:p>
          </table:table-cell>
          <table:table-cell office:value-type="string" calcext:value-type="string">
            <text:p>イジン</text:p>
          </table:table-cell>
          <table:table-cell table:formula="of:=VLOOKUP([.K15];[$種類番号.$A$1:$種類番号.$B$4];2;0)" office:value-type="float" office:value="1" calcext:value-type="float">
            <text:p>1</text:p>
          </table:table-cell>
          <table:table-cell office:value-type="string" calcext:value-type="string">
            <text:p>青</text:p>
          </table:table-cell>
          <table:table-cell table:formula="of:=VLOOKUP([.M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能力語番号.$A$1:$能力語番号.$B$10];2;0);0)" office:value-type="float" office:value="0" calcext:value-type="float">
            <text:p>0</text:p>
          </table:table-cell>
          <table:table-cell office:value-type="string" calcext:value-type="string">
            <text:p>美術</text:p>
          </table:table-cell>
          <table:table-cell table:formula="of:=IFERROR(VLOOKUP([.$S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IF(ISNA([.$S15]);&quot;null&quot;;&quot;&quot;&quot;&quot;&amp;[.$S15]&amp;&quot;&quot;&quot;&quot;);[$JSON.$E$1];[.$U15];[$JSON.$F$1];IF(ISNA([.$W15]);&quot;null&quot;;&quot;&quot;&quot;&quot;&amp;[.$W15]&amp;&quot;&quot;&quot;&quot;);[$JSON.$G$1];[.$Y15];[$JSON.$H$1];[.$H15];[$JSON.$I$1];[.J15];[$JSON.$J$1];[.$L15];[$JSON.$K$1];[.$O15];[$JSON.$L$1];[.$N15];[$JSON.$M$1];[.$R15];[$JSON.$N$1];[.$T15];[$JSON.$O$1];IF(ISNA([.$V15]);&quot;null&quot;;[.$V15]);[$JSON.$P$1];[.$X15];[$JSON.$Q$1];[.$A15];[$JSON.$R$1];[.$B15];[$JSON.$S$1])" office:value-type="string" office:string-value="{&quot;id&quot;:&quot;B-1&quot;,&quot;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orderTable&quot;:14,&quot;orderDeck&quot;:186}," calcext:value-type="string">
            <text:p>{"id":"B-1","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G16];[$収録番号.$A$1:$収録番号.$B$9];2;0)" office:value-type="float" office:value="11" calcext:value-type="float">
            <text:p>11</text:p>
          </table:table-cell>
          <table:table-cell office:value-type="string" calcext:value-type="string">
            <text:p>N</text:p>
          </table:table-cell>
          <table:table-cell table:formula="of:=VLOOKUP([.I16];[$レアリティ番号.$A$1:$レアリティ番号.$B$4];2;0)" office:value-type="float" office:value="1" calcext:value-type="float">
            <text:p>1</text:p>
          </table:table-cell>
          <table:table-cell office:value-type="string" calcext:value-type="string">
            <text:p>イジン</text:p>
          </table:table-cell>
          <table:table-cell table:formula="of:=VLOOKUP([.K16];[$種類番号.$A$1:$種類番号.$B$4];2;0)" office:value-type="float" office:value="1" calcext:value-type="float">
            <text:p>1</text:p>
          </table:table-cell>
          <table:table-cell office:value-type="string" calcext:value-type="string">
            <text:p>青</text:p>
          </table:table-cell>
          <table:table-cell table:formula="of:=VLOOKUP([.M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IF(ISNA([.$S16]);&quot;null&quot;;&quot;&quot;&quot;&quot;&amp;[.$S16]&amp;&quot;&quot;&quot;&quot;);[$JSON.$E$1];[.$U16];[$JSON.$F$1];IF(ISNA([.$W16]);&quot;null&quot;;&quot;&quot;&quot;&quot;&amp;[.$W16]&amp;&quot;&quot;&quot;&quot;);[$JSON.$G$1];[.$Y16];[$JSON.$H$1];[.$H16];[$JSON.$I$1];[.J16];[$JSON.$J$1];[.$L16];[$JSON.$K$1];[.$O16];[$JSON.$L$1];[.$N16];[$JSON.$M$1];[.$R16];[$JSON.$N$1];[.$T16];[$JSON.$O$1];IF(ISNA([.$V16]);&quot;null&quot;;[.$V16]);[$JSON.$P$1];[.$X16];[$JSON.$Q$1];[.$A16];[$JSON.$R$1];[.$B16];[$JSON.$S$1])" office:value-type="string" office:string-value="{&quot;id&quot;:&quot;B-2&quot;,&quot;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orderTable&quot;:15,&quot;orderDeck&quot;:6}," calcext:value-type="string">
            <text:p>{"id":"B-2","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G17];[$収録番号.$A$1:$収録番号.$B$9];2;0)" office:value-type="float" office:value="11" calcext:value-type="float">
            <text:p>11</text:p>
          </table:table-cell>
          <table:table-cell office:value-type="string" calcext:value-type="string">
            <text:p>N</text:p>
          </table:table-cell>
          <table:table-cell table:formula="of:=VLOOKUP([.I17];[$レアリティ番号.$A$1:$レアリティ番号.$B$4];2;0)" office:value-type="float" office:value="1" calcext:value-type="float">
            <text:p>1</text:p>
          </table:table-cell>
          <table:table-cell office:value-type="string" calcext:value-type="string">
            <text:p>イジン</text:p>
          </table:table-cell>
          <table:table-cell table:formula="of:=VLOOKUP([.K17];[$種類番号.$A$1:$種類番号.$B$4];2;0)" office:value-type="float" office:value="1" calcext:value-type="float">
            <text:p>1</text:p>
          </table:table-cell>
          <table:table-cell office:value-type="string" calcext:value-type="string">
            <text:p>青</text:p>
          </table:table-cell>
          <table:table-cell table:formula="of:=VLOOKUP([.M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IF(ISNA([.$S17]);&quot;null&quot;;&quot;&quot;&quot;&quot;&amp;[.$S17]&amp;&quot;&quot;&quot;&quot;);[$JSON.$E$1];[.$U17];[$JSON.$F$1];IF(ISNA([.$W17]);&quot;null&quot;;&quot;&quot;&quot;&quot;&amp;[.$W17]&amp;&quot;&quot;&quot;&quot;);[$JSON.$G$1];[.$Y17];[$JSON.$H$1];[.$H17];[$JSON.$I$1];[.J17];[$JSON.$J$1];[.$L17];[$JSON.$K$1];[.$O17];[$JSON.$L$1];[.$N17];[$JSON.$M$1];[.$R17];[$JSON.$N$1];[.$T17];[$JSON.$O$1];IF(ISNA([.$V17]);&quot;null&quot;;[.$V17]);[$JSON.$P$1];[.$X17];[$JSON.$Q$1];[.$A17];[$JSON.$R$1];[.$B17];[$JSON.$S$1])" office:value-type="string" office:string-value="{&quot;id&quot;:&quot;B-3&quot;,&quot;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orderTable&quot;:16,&quot;orderDeck&quot;:32}," calcext:value-type="string">
            <text:p>{"id":"B-3","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G18];[$収録番号.$A$1:$収録番号.$B$9];2;0)" office:value-type="float" office:value="11" calcext:value-type="float">
            <text:p>11</text:p>
          </table:table-cell>
          <table:table-cell office:value-type="string" calcext:value-type="string">
            <text:p>N</text:p>
          </table:table-cell>
          <table:table-cell table:formula="of:=VLOOKUP([.I18];[$レアリティ番号.$A$1:$レアリティ番号.$B$4];2;0)" office:value-type="float" office:value="1" calcext:value-type="float">
            <text:p>1</text:p>
          </table:table-cell>
          <table:table-cell office:value-type="string" calcext:value-type="string">
            <text:p>イジン</text:p>
          </table:table-cell>
          <table:table-cell table:formula="of:=VLOOKUP([.K18];[$種類番号.$A$1:$種類番号.$B$4];2;0)" office:value-type="float" office:value="1" calcext:value-type="float">
            <text:p>1</text:p>
          </table:table-cell>
          <table:table-cell office:value-type="string" calcext:value-type="string">
            <text:p>青</text:p>
          </table:table-cell>
          <table:table-cell table:formula="of:=VLOOKUP([.M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IF(ISNA([.$S18]);&quot;null&quot;;&quot;&quot;&quot;&quot;&amp;[.$S18]&amp;&quot;&quot;&quot;&quot;);[$JSON.$E$1];[.$U18];[$JSON.$F$1];IF(ISNA([.$W18]);&quot;null&quot;;&quot;&quot;&quot;&quot;&amp;[.$W18]&amp;&quot;&quot;&quot;&quot;);[$JSON.$G$1];[.$Y18];[$JSON.$H$1];[.$H18];[$JSON.$I$1];[.J18];[$JSON.$J$1];[.$L18];[$JSON.$K$1];[.$O18];[$JSON.$L$1];[.$N18];[$JSON.$M$1];[.$R18];[$JSON.$N$1];[.$T18];[$JSON.$O$1];IF(ISNA([.$V18]);&quot;null&quot;;[.$V18]);[$JSON.$P$1];[.$X18];[$JSON.$Q$1];[.$A18];[$JSON.$R$1];[.$B18];[$JSON.$S$1])" office:value-type="string" office:string-value="{&quot;id&quot;:&quot;B-4&quot;,&quot;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orderTable&quot;:17,&quot;orderDeck&quot;:74}," calcext:value-type="string">
            <text:p>{"id":"B-4","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G19];[$収録番号.$A$1:$収録番号.$B$9];2;0)" office:value-type="float" office:value="11" calcext:value-type="float">
            <text:p>11</text:p>
          </table:table-cell>
          <table:table-cell office:value-type="string" calcext:value-type="string">
            <text:p>N</text:p>
          </table:table-cell>
          <table:table-cell table:formula="of:=VLOOKUP([.I19];[$レアリティ番号.$A$1:$レアリティ番号.$B$4];2;0)" office:value-type="float" office:value="1" calcext:value-type="float">
            <text:p>1</text:p>
          </table:table-cell>
          <table:table-cell office:value-type="string" calcext:value-type="string">
            <text:p>イジン</text:p>
          </table:table-cell>
          <table:table-cell table:formula="of:=VLOOKUP([.K19];[$種類番号.$A$1:$種類番号.$B$4];2;0)" office:value-type="float" office:value="1" calcext:value-type="float">
            <text:p>1</text:p>
          </table:table-cell>
          <table:table-cell office:value-type="string" calcext:value-type="string">
            <text:p>青</text:p>
          </table:table-cell>
          <table:table-cell table:formula="of:=VLOOKUP([.M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9];[$能力語番号.$A$1:$能力語番号.$B$10];2;0);0)" office:value-type="float" office:value="0" calcext:value-type="float">
            <text:p>0</text:p>
          </table:table-cell>
          <table:table-cell office:value-type="string" calcext:value-type="string">
            <text:p>美術</text:p>
          </table:table-cell>
          <table:table-cell table:formula="of:=IFERROR(VLOOKUP([.$S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IF(ISNA([.$S19]);&quot;null&quot;;&quot;&quot;&quot;&quot;&amp;[.$S19]&amp;&quot;&quot;&quot;&quot;);[$JSON.$E$1];[.$U19];[$JSON.$F$1];IF(ISNA([.$W19]);&quot;null&quot;;&quot;&quot;&quot;&quot;&amp;[.$W19]&amp;&quot;&quot;&quot;&quot;);[$JSON.$G$1];[.$Y19];[$JSON.$H$1];[.$H19];[$JSON.$I$1];[.J19];[$JSON.$J$1];[.$L19];[$JSON.$K$1];[.$O19];[$JSON.$L$1];[.$N19];[$JSON.$M$1];[.$R19];[$JSON.$N$1];[.$T19];[$JSON.$O$1];IF(ISNA([.$V19]);&quot;null&quot;;[.$V19]);[$JSON.$P$1];[.$X19];[$JSON.$Q$1];[.$A19];[$JSON.$R$1];[.$B19];[$JSON.$S$1])" office:value-type="string" office:string-value="{&quot;id&quot;:&quot;B-5&quot;,&quot;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orderTable&quot;:18,&quot;orderDeck&quot;:75}," calcext:value-type="string">
            <text:p>{"id":"B-5","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G20];[$収録番号.$A$1:$収録番号.$B$9];2;0)" office:value-type="float" office:value="11" calcext:value-type="float">
            <text:p>11</text:p>
          </table:table-cell>
          <table:table-cell office:value-type="string" calcext:value-type="string">
            <text:p>N</text:p>
          </table:table-cell>
          <table:table-cell table:formula="of:=VLOOKUP([.I20];[$レアリティ番号.$A$1:$レアリティ番号.$B$4];2;0)" office:value-type="float" office:value="1" calcext:value-type="float">
            <text:p>1</text:p>
          </table:table-cell>
          <table:table-cell office:value-type="string" calcext:value-type="string">
            <text:p>イジン</text:p>
          </table:table-cell>
          <table:table-cell table:formula="of:=VLOOKUP([.K20];[$種類番号.$A$1:$種類番号.$B$4];2;0)" office:value-type="float" office:value="1" calcext:value-type="float">
            <text:p>1</text:p>
          </table:table-cell>
          <table:table-cell office:value-type="string" calcext:value-type="string">
            <text:p>青</text:p>
          </table:table-cell>
          <table:table-cell table:formula="of:=VLOOKUP([.M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IF(ISNA([.$S20]);&quot;null&quot;;&quot;&quot;&quot;&quot;&amp;[.$S20]&amp;&quot;&quot;&quot;&quot;);[$JSON.$E$1];[.$U20];[$JSON.$F$1];IF(ISNA([.$W20]);&quot;null&quot;;&quot;&quot;&quot;&quot;&amp;[.$W20]&amp;&quot;&quot;&quot;&quot;);[$JSON.$G$1];[.$Y20];[$JSON.$H$1];[.$H20];[$JSON.$I$1];[.J20];[$JSON.$J$1];[.$L20];[$JSON.$K$1];[.$O20];[$JSON.$L$1];[.$N20];[$JSON.$M$1];[.$R20];[$JSON.$N$1];[.$T20];[$JSON.$O$1];IF(ISNA([.$V20]);&quot;null&quot;;[.$V20]);[$JSON.$P$1];[.$X20];[$JSON.$Q$1];[.$A20];[$JSON.$R$1];[.$B20];[$JSON.$S$1])" office:value-type="string" office:string-value="{&quot;id&quot;:&quot;B-6&quot;,&quot;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orderTable&quot;:19,&quot;orderDeck&quot;:33}," calcext:value-type="string">
            <text:p>{"id":"B-6","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G21];[$収録番号.$A$1:$収録番号.$B$9];2;0)" office:value-type="float" office:value="11" calcext:value-type="float">
            <text:p>11</text:p>
          </table:table-cell>
          <table:table-cell office:value-type="string" calcext:value-type="string">
            <text:p>N</text:p>
          </table:table-cell>
          <table:table-cell table:formula="of:=VLOOKUP([.I21];[$レアリティ番号.$A$1:$レアリティ番号.$B$4];2;0)" office:value-type="float" office:value="1" calcext:value-type="float">
            <text:p>1</text:p>
          </table:table-cell>
          <table:table-cell office:value-type="string" calcext:value-type="string">
            <text:p>イジン</text:p>
          </table:table-cell>
          <table:table-cell table:formula="of:=VLOOKUP([.K21];[$種類番号.$A$1:$種類番号.$B$4];2;0)" office:value-type="float" office:value="1" calcext:value-type="float">
            <text:p>1</text:p>
          </table:table-cell>
          <table:table-cell office:value-type="string" calcext:value-type="string">
            <text:p>青</text:p>
          </table:table-cell>
          <table:table-cell table:formula="of:=VLOOKUP([.M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IF(ISNA([.$S21]);&quot;null&quot;;&quot;&quot;&quot;&quot;&amp;[.$S21]&amp;&quot;&quot;&quot;&quot;);[$JSON.$E$1];[.$U21];[$JSON.$F$1];IF(ISNA([.$W21]);&quot;null&quot;;&quot;&quot;&quot;&quot;&amp;[.$W21]&amp;&quot;&quot;&quot;&quot;);[$JSON.$G$1];[.$Y21];[$JSON.$H$1];[.$H21];[$JSON.$I$1];[.J21];[$JSON.$J$1];[.$L21];[$JSON.$K$1];[.$O21];[$JSON.$L$1];[.$N21];[$JSON.$M$1];[.$R21];[$JSON.$N$1];[.$T21];[$JSON.$O$1];IF(ISNA([.$V21]);&quot;null&quot;;[.$V21]);[$JSON.$P$1];[.$X21];[$JSON.$Q$1];[.$A21];[$JSON.$R$1];[.$B21];[$JSON.$S$1])" office:value-type="string" office:string-value="{&quot;id&quot;:&quot;B-7&quot;,&quot;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orderTable&quot;:20,&quot;orderDeck&quot;:76}," calcext:value-type="string">
            <text:p>{"id":"B-7","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G22];[$収録番号.$A$1:$収録番号.$B$9];2;0)" office:value-type="float" office:value="11" calcext:value-type="float">
            <text:p>11</text:p>
          </table:table-cell>
          <table:table-cell office:value-type="string" calcext:value-type="string">
            <text:p>N</text:p>
          </table:table-cell>
          <table:table-cell table:formula="of:=VLOOKUP([.I22];[$レアリティ番号.$A$1:$レアリティ番号.$B$4];2;0)" office:value-type="float" office:value="1" calcext:value-type="float">
            <text:p>1</text:p>
          </table:table-cell>
          <table:table-cell office:value-type="string" calcext:value-type="string">
            <text:p>イジン</text:p>
          </table:table-cell>
          <table:table-cell table:formula="of:=VLOOKUP([.K22];[$種類番号.$A$1:$種類番号.$B$4];2;0)" office:value-type="float" office:value="1" calcext:value-type="float">
            <text:p>1</text:p>
          </table:table-cell>
          <table:table-cell office:value-type="string" calcext:value-type="string">
            <text:p>青</text:p>
          </table:table-cell>
          <table:table-cell table:formula="of:=VLOOKUP([.M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IF(ISNA([.$S22]);&quot;null&quot;;&quot;&quot;&quot;&quot;&amp;[.$S22]&amp;&quot;&quot;&quot;&quot;);[$JSON.$E$1];[.$U22];[$JSON.$F$1];IF(ISNA([.$W22]);&quot;null&quot;;&quot;&quot;&quot;&quot;&amp;[.$W22]&amp;&quot;&quot;&quot;&quot;);[$JSON.$G$1];[.$Y22];[$JSON.$H$1];[.$H22];[$JSON.$I$1];[.J22];[$JSON.$J$1];[.$L22];[$JSON.$K$1];[.$O22];[$JSON.$L$1];[.$N22];[$JSON.$M$1];[.$R22];[$JSON.$N$1];[.$T22];[$JSON.$O$1];IF(ISNA([.$V22]);&quot;null&quot;;[.$V22]);[$JSON.$P$1];[.$X22];[$JSON.$Q$1];[.$A22];[$JSON.$R$1];[.$B22];[$JSON.$S$1])" office:value-type="string" office:string-value="{&quot;id&quot;:&quot;B-8&quot;,&quot;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orderTable&quot;:21,&quot;orderDeck&quot;:154}," calcext:value-type="string">
            <text:p>{"id":"B-8","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G23];[$収録番号.$A$1:$収録番号.$B$9];2;0)" office:value-type="float" office:value="11" calcext:value-type="float">
            <text:p>11</text:p>
          </table:table-cell>
          <table:table-cell office:value-type="string" calcext:value-type="string">
            <text:p>N</text:p>
          </table:table-cell>
          <table:table-cell table:formula="of:=VLOOKUP([.I23];[$レアリティ番号.$A$1:$レアリティ番号.$B$4];2;0)" office:value-type="float" office:value="1" calcext:value-type="float">
            <text:p>1</text:p>
          </table:table-cell>
          <table:table-cell office:value-type="string" calcext:value-type="string">
            <text:p>ハイケイ</text:p>
          </table:table-cell>
          <table:table-cell table:formula="of:=VLOOKUP([.K23];[$種類番号.$A$1:$種類番号.$B$4];2;0)" office:value-type="float" office:value="2" calcext:value-type="float">
            <text:p>2</text:p>
          </table:table-cell>
          <table:table-cell office:value-type="string" calcext:value-type="string">
            <text:p>青</text:p>
          </table:table-cell>
          <table:table-cell table:formula="of:=VLOOKUP([.M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能力語番号.$A$1:$能力語番号.$B$10];2;0);0)" office:value-type="float" office:value="0" calcext:value-type="float">
            <text:p>0</text:p>
          </table:table-cell>
          <table:table-cell office:value-type="string" calcext:value-type="string">
            <text:p>美術</text:p>
          </table:table-cell>
          <table:table-cell table:formula="of:=IFERROR(VLOOKUP([.$S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IF(ISNA([.$S23]);&quot;null&quot;;&quot;&quot;&quot;&quot;&amp;[.$S23]&amp;&quot;&quot;&quot;&quot;);[$JSON.$E$1];[.$U23];[$JSON.$F$1];IF(ISNA([.$W23]);&quot;null&quot;;&quot;&quot;&quot;&quot;&amp;[.$W23]&amp;&quot;&quot;&quot;&quot;);[$JSON.$G$1];[.$Y23];[$JSON.$H$1];[.$H23];[$JSON.$I$1];[.J23];[$JSON.$J$1];[.$L23];[$JSON.$K$1];[.$O23];[$JSON.$L$1];[.$N23];[$JSON.$M$1];[.$R23];[$JSON.$N$1];[.$T23];[$JSON.$O$1];IF(ISNA([.$V23]);&quot;null&quot;;[.$V23]);[$JSON.$P$1];[.$X23];[$JSON.$Q$1];[.$A23];[$JSON.$R$1];[.$B23];[$JSON.$S$1])" office:value-type="string" office:string-value="{&quot;id&quot;:&quot;B-9&quot;,&quot;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orderTable&quot;:22,&quot;orderDeck&quot;:242}," calcext:value-type="string">
            <text:p>{"id":"B-9","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G24];[$収録番号.$A$1:$収録番号.$B$9];2;0)" office:value-type="float" office:value="11" calcext:value-type="float">
            <text:p>11</text:p>
          </table:table-cell>
          <table:table-cell office:value-type="string" calcext:value-type="string">
            <text:p>N</text:p>
          </table:table-cell>
          <table:table-cell table:formula="of:=VLOOKUP([.I24];[$レアリティ番号.$A$1:$レアリティ番号.$B$4];2;0)" office:value-type="float" office:value="1" calcext:value-type="float">
            <text:p>1</text:p>
          </table:table-cell>
          <table:table-cell office:value-type="string" calcext:value-type="string">
            <text:p>ハイケイ</text:p>
          </table:table-cell>
          <table:table-cell table:formula="of:=VLOOKUP([.K24];[$種類番号.$A$1:$種類番号.$B$4];2;0)" office:value-type="float" office:value="2" calcext:value-type="float">
            <text:p>2</text:p>
          </table:table-cell>
          <table:table-cell office:value-type="string" calcext:value-type="string">
            <text:p>青</text:p>
          </table:table-cell>
          <table:table-cell table:formula="of:=VLOOKUP([.M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IF(ISNA([.$S24]);&quot;null&quot;;&quot;&quot;&quot;&quot;&amp;[.$S24]&amp;&quot;&quot;&quot;&quot;);[$JSON.$E$1];[.$U24];[$JSON.$F$1];IF(ISNA([.$W24]);&quot;null&quot;;&quot;&quot;&quot;&quot;&amp;[.$W24]&amp;&quot;&quot;&quot;&quot;);[$JSON.$G$1];[.$Y24];[$JSON.$H$1];[.$H24];[$JSON.$I$1];[.J24];[$JSON.$J$1];[.$L24];[$JSON.$K$1];[.$O24];[$JSON.$L$1];[.$N24];[$JSON.$M$1];[.$R24];[$JSON.$N$1];[.$T24];[$JSON.$O$1];IF(ISNA([.$V24]);&quot;null&quot;;[.$V24]);[$JSON.$P$1];[.$X24];[$JSON.$Q$1];[.$A24];[$JSON.$R$1];[.$B24];[$JSON.$S$1])" office:value-type="string" office:string-value="{&quot;id&quot;:&quot;B-10&quot;,&quot;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orderTable&quot;:23,&quot;orderDeck&quot;:251}," calcext:value-type="string">
            <text:p>{"id":"B-10","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G25];[$収録番号.$A$1:$収録番号.$B$9];2;0)" office:value-type="float" office:value="11" calcext:value-type="float">
            <text:p>11</text:p>
          </table:table-cell>
          <table:table-cell office:value-type="string" calcext:value-type="string">
            <text:p>N</text:p>
          </table:table-cell>
          <table:table-cell table:formula="of:=VLOOKUP([.I25];[$レアリティ番号.$A$1:$レアリティ番号.$B$4];2;0)" office:value-type="float" office:value="1" calcext:value-type="float">
            <text:p>1</text:p>
          </table:table-cell>
          <table:table-cell office:value-type="string" calcext:value-type="string">
            <text:p>マホウ</text:p>
          </table:table-cell>
          <table:table-cell table:formula="of:=VLOOKUP([.K25];[$種類番号.$A$1:$種類番号.$B$4];2;0)" office:value-type="float" office:value="3" calcext:value-type="float">
            <text:p>3</text:p>
          </table:table-cell>
          <table:table-cell office:value-type="string" calcext:value-type="string">
            <text:p>青</text:p>
          </table:table-cell>
          <table:table-cell table:formula="of:=VLOOKUP([.M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IF(ISNA([.$S25]);&quot;null&quot;;&quot;&quot;&quot;&quot;&amp;[.$S25]&amp;&quot;&quot;&quot;&quot;);[$JSON.$E$1];[.$U25];[$JSON.$F$1];IF(ISNA([.$W25]);&quot;null&quot;;&quot;&quot;&quot;&quot;&amp;[.$W25]&amp;&quot;&quot;&quot;&quot;);[$JSON.$G$1];[.$Y25];[$JSON.$H$1];[.$H25];[$JSON.$I$1];[.J25];[$JSON.$J$1];[.$L25];[$JSON.$K$1];[.$O25];[$JSON.$L$1];[.$N25];[$JSON.$M$1];[.$R25];[$JSON.$N$1];[.$T25];[$JSON.$O$1];IF(ISNA([.$V25]);&quot;null&quot;;[.$V25]);[$JSON.$P$1];[.$X25];[$JSON.$Q$1];[.$A25];[$JSON.$R$1];[.$B25];[$JSON.$S$1])" office:value-type="string" office:string-value="{&quot;id&quot;:&quot;B-11&quot;,&quot;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orderTable&quot;:24,&quot;orderDeck&quot;:307}," calcext:value-type="string">
            <text:p>{"id":"B-11","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G26];[$収録番号.$A$1:$収録番号.$B$9];2;0)" office:value-type="float" office:value="11" calcext:value-type="float">
            <text:p>11</text:p>
          </table:table-cell>
          <table:table-cell office:value-type="string" calcext:value-type="string">
            <text:p>N</text:p>
          </table:table-cell>
          <table:table-cell table:formula="of:=VLOOKUP([.I26];[$レアリティ番号.$A$1:$レアリティ番号.$B$4];2;0)" office:value-type="float" office:value="1" calcext:value-type="float">
            <text:p>1</text:p>
          </table:table-cell>
          <table:table-cell office:value-type="string" calcext:value-type="string">
            <text:p>マホウ</text:p>
          </table:table-cell>
          <table:table-cell table:formula="of:=VLOOKUP([.K26];[$種類番号.$A$1:$種類番号.$B$4];2;0)" office:value-type="float" office:value="3" calcext:value-type="float">
            <text:p>3</text:p>
          </table:table-cell>
          <table:table-cell office:value-type="string" calcext:value-type="string">
            <text:p>青</text:p>
          </table:table-cell>
          <table:table-cell table:formula="of:=VLOOKUP([.M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特性番号.$A$1:$特性番号.$B$8];2;0);0)" office:value-type="float" office:value="0" calcext:value-type="float">
            <text:p>0</text:p>
          </table:table-cell>
          <table:table-cell office:value-type="string" calcext:value-type="string">
            <text:p>2ドロー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IF(ISNA([.$S26]);&quot;null&quot;;&quot;&quot;&quot;&quot;&amp;[.$S26]&amp;&quot;&quot;&quot;&quot;);[$JSON.$E$1];[.$U26];[$JSON.$F$1];IF(ISNA([.$W26]);&quot;null&quot;;&quot;&quot;&quot;&quot;&amp;[.$W26]&amp;&quot;&quot;&quot;&quot;);[$JSON.$G$1];[.$Y26];[$JSON.$H$1];[.$H26];[$JSON.$I$1];[.J26];[$JSON.$J$1];[.$L26];[$JSON.$K$1];[.$O26];[$JSON.$L$1];[.$N26];[$JSON.$M$1];[.$R26];[$JSON.$N$1];[.$T26];[$JSON.$O$1];IF(ISNA([.$V26]);&quot;null&quot;;[.$V26]);[$JSON.$P$1];[.$X26];[$JSON.$Q$1];[.$A26];[$JSON.$R$1];[.$B26];[$JSON.$S$1])" office:value-type="string" office:string-value="{&quot;id&quot;:&quot;B-12&quot;,&quot;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orderTable&quot;:25,&quot;orderDeck&quot;:308}," calcext:value-type="string">
            <text:p>{"id":"B-12","name":"ドローイング","kana":"どろーいんぐ","traitText":null,"ruleText":"2ドローする。","legacyText":"冥府発動","imageUrl":"https://one-draw.jp/ijinden/cardlist/B01/card/B_012.png","expansion":11,"rarity":1,"type":3,"level":3,"color":2,"term":0,"trait":0,"power":null,"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G27];[$収録番号.$A$1:$収録番号.$B$9];2;0)" office:value-type="float" office:value="11" calcext:value-type="float">
            <text:p>11</text:p>
          </table:table-cell>
          <table:table-cell office:value-type="string" calcext:value-type="string">
            <text:p>N</text:p>
          </table:table-cell>
          <table:table-cell table:formula="of:=VLOOKUP([.I27];[$レアリティ番号.$A$1:$レアリティ番号.$B$4];2;0)" office:value-type="float" office:value="1" calcext:value-type="float">
            <text:p>1</text:p>
          </table:table-cell>
          <table:table-cell office:value-type="string" calcext:value-type="string">
            <text:p>マリョク</text:p>
          </table:table-cell>
          <table:table-cell table:formula="of:=VLOOKUP([.K27];[$種類番号.$A$1:$種類番号.$B$4];2;0)" office:value-type="float" office:value="4" calcext:value-type="float">
            <text:p>4</text:p>
          </table:table-cell>
          <table:table-cell office:value-type="string" calcext:value-type="string">
            <text:p>青</text:p>
          </table:table-cell>
          <table:table-cell table:formula="of:=VLOOKUP([.M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IF(ISNA([.$S27]);&quot;null&quot;;&quot;&quot;&quot;&quot;&amp;[.$S27]&amp;&quot;&quot;&quot;&quot;);[$JSON.$E$1];[.$U27];[$JSON.$F$1];IF(ISNA([.$W27]);&quot;null&quot;;&quot;&quot;&quot;&quot;&amp;[.$W27]&amp;&quot;&quot;&quot;&quot;);[$JSON.$G$1];[.$Y27];[$JSON.$H$1];[.$H27];[$JSON.$I$1];[.J27];[$JSON.$J$1];[.$L27];[$JSON.$K$1];[.$O27];[$JSON.$L$1];[.$N27];[$JSON.$M$1];[.$R27];[$JSON.$N$1];[.$T27];[$JSON.$O$1];IF(ISNA([.$V27]);&quot;null&quot;;[.$V27]);[$JSON.$P$1];[.$X27];[$JSON.$Q$1];[.$A27];[$JSON.$R$1];[.$B27];[$JSON.$S$1])" office:value-type="string" office:string-value="{&quot;id&quot;:&quot;B-13&quot;,&quot;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orderTable&quot;:26,&quot;orderDeck&quot;:349}," calcext:value-type="string">
            <text:p>{"id":"B-13","name":"ブルーストーン","kana":"ぶるーすとーん","traitText":null,"ruleText":"※デッキに何枚でも入れてよい。","legacyText":"復元","imageUrl":"https://one-draw.jp/ijinden/cardlist/B01/card/B_013.png","expansion":11,"rarity":1,"type":4,"level":1,"color":2,"term":0,"trait":0,"power":null,"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G28];[$収録番号.$A$1:$収録番号.$B$9];2;0)" office:value-type="float" office:value="12" calcext:value-type="float">
            <text:p>12</text:p>
          </table:table-cell>
          <table:table-cell office:value-type="string" calcext:value-type="string">
            <text:p>SR</text:p>
          </table:table-cell>
          <table:table-cell table:formula="of:=VLOOKUP([.I28];[$レアリティ番号.$A$1:$レアリティ番号.$B$4];2;0)" office:value-type="float" office:value="4" calcext:value-type="float">
            <text:p>4</text:p>
          </table:table-cell>
          <table:table-cell office:value-type="string" calcext:value-type="string">
            <text:p>イジン</text:p>
          </table:table-cell>
          <table:table-cell table:formula="of:=VLOOKUP([.K28];[$種類番号.$A$1:$種類番号.$B$4];2;0)" office:value-type="float" office:value="1" calcext:value-type="float">
            <text:p>1</text:p>
          </table:table-cell>
          <table:table-cell office:value-type="string" calcext:value-type="string">
            <text:p>緑</text:p>
          </table:table-cell>
          <table:table-cell table:formula="of:=VLOOKUP([.M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IF(ISNA([.$S28]);&quot;null&quot;;&quot;&quot;&quot;&quot;&amp;[.$S28]&amp;&quot;&quot;&quot;&quot;);[$JSON.$E$1];[.$U28];[$JSON.$F$1];IF(ISNA([.$W28]);&quot;null&quot;;&quot;&quot;&quot;&quot;&amp;[.$W28]&amp;&quot;&quot;&quot;&quot;);[$JSON.$G$1];[.$Y28];[$JSON.$H$1];[.$H28];[$JSON.$I$1];[.J28];[$JSON.$J$1];[.$L28];[$JSON.$K$1];[.$O28];[$JSON.$L$1];[.$N28];[$JSON.$M$1];[.$R28];[$JSON.$N$1];[.$T28];[$JSON.$O$1];IF(ISNA([.$V28]);&quot;null&quot;;[.$V28]);[$JSON.$P$1];[.$X28];[$JSON.$Q$1];[.$A28];[$JSON.$R$1];[.$B28];[$JSON.$S$1])" office:value-type="string" office:string-value="{&quot;id&quot;:&quot;G-1&quot;,&quot;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orderTable&quot;:27,&quot;orderDeck&quot;:163}," calcext:value-type="string">
            <text:p>{"id":"G-1","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G29];[$収録番号.$A$1:$収録番号.$B$9];2;0)" office:value-type="float" office:value="12" calcext:value-type="float">
            <text:p>12</text:p>
          </table:table-cell>
          <table:table-cell office:value-type="string" calcext:value-type="string">
            <text:p>N</text:p>
          </table:table-cell>
          <table:table-cell table:formula="of:=VLOOKUP([.I29];[$レアリティ番号.$A$1:$レアリティ番号.$B$4];2;0)" office:value-type="float" office:value="1" calcext:value-type="float">
            <text:p>1</text:p>
          </table:table-cell>
          <table:table-cell office:value-type="string" calcext:value-type="string">
            <text:p>イジン</text:p>
          </table:table-cell>
          <table:table-cell table:formula="of:=VLOOKUP([.K29];[$種類番号.$A$1:$種類番号.$B$4];2;0)" office:value-type="float" office:value="1" calcext:value-type="float">
            <text:p>1</text:p>
          </table:table-cell>
          <table:table-cell office:value-type="string" calcext:value-type="string">
            <text:p>緑</text:p>
          </table:table-cell>
          <table:table-cell table:formula="of:=VLOOKUP([.M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office:value-type="float" office:value="500" calcext:value-type="float">
            <text:p>500</text:p>
          </table:table-cell>
          <table:table-cell table:style-name="ce8" table:formula="of:=NA()" office:value-type="string" office:string-value="" calcext:value-type="error">
            <text:p>#N/A</text:p>
          </table:table-cell>
          <table:table-cell table:formula="of:=IFERROR(VLOOKUP([.$W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IF(ISNA([.$S29]);&quot;null&quot;;&quot;&quot;&quot;&quot;&amp;[.$S29]&amp;&quot;&quot;&quot;&quot;);[$JSON.$E$1];[.$U29];[$JSON.$F$1];IF(ISNA([.$W29]);&quot;null&quot;;&quot;&quot;&quot;&quot;&amp;[.$W29]&amp;&quot;&quot;&quot;&quot;);[$JSON.$G$1];[.$Y29];[$JSON.$H$1];[.$H29];[$JSON.$I$1];[.J29];[$JSON.$J$1];[.$L29];[$JSON.$K$1];[.$O29];[$JSON.$L$1];[.$N29];[$JSON.$M$1];[.$R29];[$JSON.$N$1];[.$T29];[$JSON.$O$1];IF(ISNA([.$V29]);&quot;null&quot;;[.$V29]);[$JSON.$P$1];[.$X29];[$JSON.$Q$1];[.$A29];[$JSON.$R$1];[.$B29];[$JSON.$S$1])" office:value-type="string" office:string-value="{&quot;id&quot;:&quot;G-2&quot;,&quot;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orderTable&quot;:28,&quot;orderDeck&quot;:12}," calcext:value-type="string">
            <text:p>{"id":"G-2","name":"卑弥呼","kana":"ひみこ","traitText":null,"ruleText":"戦場に置かれたとき、自分の山札の上から1枚を、裏のまま魔力ゾーンに置く。","legacyText":null,"imageUrl":"https://one-draw.jp/ijinden/cardlist/G01/card/G_002.png","expansion":12,"rarity":1,"type":1,"level":1,"color":4,"term":0,"trait":0,"power":50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G30];[$収録番号.$A$1:$収録番号.$B$9];2;0)" office:value-type="float" office:value="12" calcext:value-type="float">
            <text:p>12</text:p>
          </table:table-cell>
          <table:table-cell office:value-type="string" calcext:value-type="string">
            <text:p>N</text:p>
          </table:table-cell>
          <table:table-cell table:formula="of:=VLOOKUP([.I30];[$レアリティ番号.$A$1:$レアリティ番号.$B$4];2;0)" office:value-type="float" office:value="1" calcext:value-type="float">
            <text:p>1</text:p>
          </table:table-cell>
          <table:table-cell office:value-type="string" calcext:value-type="string">
            <text:p>イジン</text:p>
          </table:table-cell>
          <table:table-cell table:formula="of:=VLOOKUP([.K30];[$種類番号.$A$1:$種類番号.$B$4];2;0)" office:value-type="float" office:value="1" calcext:value-type="float">
            <text:p>1</text:p>
          </table:table-cell>
          <table:table-cell office:value-type="string" calcext:value-type="string">
            <text:p>緑</text:p>
          </table:table-cell>
          <table:table-cell table:formula="of:=VLOOKUP([.M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IF(ISNA([.$S30]);&quot;null&quot;;&quot;&quot;&quot;&quot;&amp;[.$S30]&amp;&quot;&quot;&quot;&quot;);[$JSON.$E$1];[.$U30];[$JSON.$F$1];IF(ISNA([.$W30]);&quot;null&quot;;&quot;&quot;&quot;&quot;&amp;[.$W30]&amp;&quot;&quot;&quot;&quot;);[$JSON.$G$1];[.$Y30];[$JSON.$H$1];[.$H30];[$JSON.$I$1];[.J30];[$JSON.$J$1];[.$L30];[$JSON.$K$1];[.$O30];[$JSON.$L$1];[.$N30];[$JSON.$M$1];[.$R30];[$JSON.$N$1];[.$T30];[$JSON.$O$1];IF(ISNA([.$V30]);&quot;null&quot;;[.$V30]);[$JSON.$P$1];[.$X30];[$JSON.$Q$1];[.$A30];[$JSON.$R$1];[.$B30];[$JSON.$S$1])" office:value-type="string" office:string-value="{&quot;id&quot;:&quot;G-3&quot;,&quot;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orderTable&quot;:29,&quot;orderDeck&quot;:84}," calcext:value-type="string">
            <text:p>{"id":"G-3","name":"アテルイ","kana":"あてるい","traitText":null,"ruleText":"「剣術」イジンが戦場に置かれたとき、これを起こす。¶アタック+1000","legacyText":"1ドローする","imageUrl":"https://one-draw.jp/ijinden/cardlist/G01/card/G_003.png","expansion":12,"rarity":1,"type":1,"level":3,"color":4,"term":0,"trait":0,"power":200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G31];[$収録番号.$A$1:$収録番号.$B$9];2;0)" office:value-type="float" office:value="12" calcext:value-type="float">
            <text:p>12</text:p>
          </table:table-cell>
          <table:table-cell office:value-type="string" calcext:value-type="string">
            <text:p>N</text:p>
          </table:table-cell>
          <table:table-cell table:formula="of:=VLOOKUP([.I31];[$レアリティ番号.$A$1:$レアリティ番号.$B$4];2;0)" office:value-type="float" office:value="1" calcext:value-type="float">
            <text:p>1</text:p>
          </table:table-cell>
          <table:table-cell office:value-type="string" calcext:value-type="string">
            <text:p>イジン</text:p>
          </table:table-cell>
          <table:table-cell table:formula="of:=VLOOKUP([.K31];[$種類番号.$A$1:$種類番号.$B$4];2;0)" office:value-type="float" office:value="1" calcext:value-type="float">
            <text:p>1</text:p>
          </table:table-cell>
          <table:table-cell office:value-type="string" calcext:value-type="string">
            <text:p>緑</text:p>
          </table:table-cell>
          <table:table-cell table:formula="of:=VLOOKUP([.M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IF(ISNA([.$S31]);&quot;null&quot;;&quot;&quot;&quot;&quot;&amp;[.$S31]&amp;&quot;&quot;&quot;&quot;);[$JSON.$E$1];[.$U31];[$JSON.$F$1];IF(ISNA([.$W31]);&quot;null&quot;;&quot;&quot;&quot;&quot;&amp;[.$W31]&amp;&quot;&quot;&quot;&quot;);[$JSON.$G$1];[.$Y31];[$JSON.$H$1];[.$H31];[$JSON.$I$1];[.J31];[$JSON.$J$1];[.$L31];[$JSON.$K$1];[.$O31];[$JSON.$L$1];[.$N31];[$JSON.$M$1];[.$R31];[$JSON.$N$1];[.$T31];[$JSON.$O$1];IF(ISNA([.$V31]);&quot;null&quot;;[.$V31]);[$JSON.$P$1];[.$X31];[$JSON.$Q$1];[.$A31];[$JSON.$R$1];[.$B31];[$JSON.$S$1])" office:value-type="string" office:string-value="{&quot;id&quot;:&quot;G-4&quot;,&quot;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orderTable&quot;:30,&quot;orderDeck&quot;:44}," calcext:value-type="string">
            <text:p>{"id":"G-4","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G32];[$収録番号.$A$1:$収録番号.$B$9];2;0)" office:value-type="float" office:value="12" calcext:value-type="float">
            <text:p>12</text:p>
          </table:table-cell>
          <table:table-cell office:value-type="string" calcext:value-type="string">
            <text:p>N</text:p>
          </table:table-cell>
          <table:table-cell table:formula="of:=VLOOKUP([.I32];[$レアリティ番号.$A$1:$レアリティ番号.$B$4];2;0)" office:value-type="float" office:value="1" calcext:value-type="float">
            <text:p>1</text:p>
          </table:table-cell>
          <table:table-cell office:value-type="string" calcext:value-type="string">
            <text:p>イジン</text:p>
          </table:table-cell>
          <table:table-cell table:formula="of:=VLOOKUP([.K32];[$種類番号.$A$1:$種類番号.$B$4];2;0)" office:value-type="float" office:value="1" calcext:value-type="float">
            <text:p>1</text:p>
          </table:table-cell>
          <table:table-cell office:value-type="string" calcext:value-type="string">
            <text:p>緑</text:p>
          </table:table-cell>
          <table:table-cell table:formula="of:=VLOOKUP([.M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特性番号.$A$1:$特性番号.$B$8];2;0);0)" office:value-type="float" office:value="0" calcext:value-type="float">
            <text:p>0</text:p>
          </table:table-cell>
          <table:table-cell office:value-type="string" calcext:value-type="string">
            <text:p>「航海」が発動したとき、1ドローして、これを起こす。</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IF(ISNA([.$S32]);&quot;null&quot;;&quot;&quot;&quot;&quot;&amp;[.$S32]&amp;&quot;&quot;&quot;&quot;);[$JSON.$E$1];[.$U32];[$JSON.$F$1];IF(ISNA([.$W32]);&quot;null&quot;;&quot;&quot;&quot;&quot;&amp;[.$W32]&amp;&quot;&quot;&quot;&quot;);[$JSON.$G$1];[.$Y32];[$JSON.$H$1];[.$H32];[$JSON.$I$1];[.J32];[$JSON.$J$1];[.$L32];[$JSON.$K$1];[.$O32];[$JSON.$L$1];[.$N32];[$JSON.$M$1];[.$R32];[$JSON.$N$1];[.$T32];[$JSON.$O$1];IF(ISNA([.$V32]);&quot;null&quot;;[.$V32]);[$JSON.$P$1];[.$X32];[$JSON.$Q$1];[.$A32];[$JSON.$R$1];[.$B32];[$JSON.$S$1])" office:value-type="string" office:string-value="{&quot;id&quot;:&quot;G-5&quot;,&quot;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orderTable&quot;:31,&quot;orderDeck&quot;:123}," calcext:value-type="string">
            <text:p>{"id":"G-5","name":"阿倍仲麻呂","kana":"あべのなかまろ","traitText":null,"ruleText":"「航海」が発動したとき、1ドローして、これを起こす。","legacyText":null,"imageUrl":"https://one-draw.jp/ijinden/cardlist/G01/card/G_005.png","expansion":12,"rarity":1,"type":1,"level":4,"color":4,"term":0,"trait":0,"power":400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G33];[$収録番号.$A$1:$収録番号.$B$9];2;0)" office:value-type="float" office:value="12" calcext:value-type="float">
            <text:p>12</text:p>
          </table:table-cell>
          <table:table-cell office:value-type="string" calcext:value-type="string">
            <text:p>N</text:p>
          </table:table-cell>
          <table:table-cell table:formula="of:=VLOOKUP([.I33];[$レアリティ番号.$A$1:$レアリティ番号.$B$4];2;0)" office:value-type="float" office:value="1" calcext:value-type="float">
            <text:p>1</text:p>
          </table:table-cell>
          <table:table-cell office:value-type="string" calcext:value-type="string">
            <text:p>イジン</text:p>
          </table:table-cell>
          <table:table-cell table:formula="of:=VLOOKUP([.K33];[$種類番号.$A$1:$種類番号.$B$4];2;0)" office:value-type="float" office:value="1" calcext:value-type="float">
            <text:p>1</text:p>
          </table:table-cell>
          <table:table-cell office:value-type="string" calcext:value-type="string">
            <text:p>緑</text:p>
          </table:table-cell>
          <table:table-cell table:formula="of:=VLOOKUP([.M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能力語番号.$A$1:$能力語番号.$B$10];2;0);0)" office:value-type="float" office:value="0" calcext:value-type="float">
            <text:p>0</text:p>
          </table:table-cell>
          <table:table-cell office:value-type="string" calcext:value-type="string">
            <text:p>美術</text:p>
          </table:table-cell>
          <table:table-cell table:formula="of:=IFERROR(VLOOKUP([.$S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IF(ISNA([.$S33]);&quot;null&quot;;&quot;&quot;&quot;&quot;&amp;[.$S33]&amp;&quot;&quot;&quot;&quot;);[$JSON.$E$1];[.$U33];[$JSON.$F$1];IF(ISNA([.$W33]);&quot;null&quot;;&quot;&quot;&quot;&quot;&amp;[.$W33]&amp;&quot;&quot;&quot;&quot;);[$JSON.$G$1];[.$Y33];[$JSON.$H$1];[.$H33];[$JSON.$I$1];[.J33];[$JSON.$J$1];[.$L33];[$JSON.$K$1];[.$O33];[$JSON.$L$1];[.$N33];[$JSON.$M$1];[.$R33];[$JSON.$N$1];[.$T33];[$JSON.$O$1];IF(ISNA([.$V33]);&quot;null&quot;;[.$V33]);[$JSON.$P$1];[.$X33];[$JSON.$Q$1];[.$A33];[$JSON.$R$1];[.$B33];[$JSON.$S$1])" office:value-type="string" office:string-value="{&quot;id&quot;:&quot;G-6&quot;,&quot;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orderTable&quot;:32,&quot;orderDeck&quot;:85}," calcext:value-type="string">
            <text:p>{"id":"G-6","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G34];[$収録番号.$A$1:$収録番号.$B$9];2;0)" office:value-type="float" office:value="12" calcext:value-type="float">
            <text:p>12</text:p>
          </table:table-cell>
          <table:table-cell office:value-type="string" calcext:value-type="string">
            <text:p>N</text:p>
          </table:table-cell>
          <table:table-cell table:formula="of:=VLOOKUP([.I34];[$レアリティ番号.$A$1:$レアリティ番号.$B$4];2;0)" office:value-type="float" office:value="1" calcext:value-type="float">
            <text:p>1</text:p>
          </table:table-cell>
          <table:table-cell office:value-type="string" calcext:value-type="string">
            <text:p>イジン</text:p>
          </table:table-cell>
          <table:table-cell table:formula="of:=VLOOKUP([.K34];[$種類番号.$A$1:$種類番号.$B$4];2;0)" office:value-type="float" office:value="1" calcext:value-type="float">
            <text:p>1</text:p>
          </table:table-cell>
          <table:table-cell office:value-type="string" calcext:value-type="string">
            <text:p>緑</text:p>
          </table:table-cell>
          <table:table-cell table:formula="of:=VLOOKUP([.M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IF(ISNA([.$S34]);&quot;null&quot;;&quot;&quot;&quot;&quot;&amp;[.$S34]&amp;&quot;&quot;&quot;&quot;);[$JSON.$E$1];[.$U34];[$JSON.$F$1];IF(ISNA([.$W34]);&quot;null&quot;;&quot;&quot;&quot;&quot;&amp;[.$W34]&amp;&quot;&quot;&quot;&quot;);[$JSON.$G$1];[.$Y34];[$JSON.$H$1];[.$H34];[$JSON.$I$1];[.J34];[$JSON.$J$1];[.$L34];[$JSON.$K$1];[.$O34];[$JSON.$L$1];[.$N34];[$JSON.$M$1];[.$R34];[$JSON.$N$1];[.$T34];[$JSON.$O$1];IF(ISNA([.$V34]);&quot;null&quot;;[.$V34]);[$JSON.$P$1];[.$X34];[$JSON.$Q$1];[.$A34];[$JSON.$R$1];[.$B34];[$JSON.$S$1])" office:value-type="string" office:string-value="{&quot;id&quot;:&quot;G-7&quot;,&quot;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orderTable&quot;:33,&quot;orderDeck&quot;:124}," calcext:value-type="string">
            <text:p>{"id":"G-7","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G35];[$収録番号.$A$1:$収録番号.$B$9];2;0)" office:value-type="float" office:value="12" calcext:value-type="float">
            <text:p>12</text:p>
          </table:table-cell>
          <table:table-cell office:value-type="string" calcext:value-type="string">
            <text:p>N</text:p>
          </table:table-cell>
          <table:table-cell table:formula="of:=VLOOKUP([.I35];[$レアリティ番号.$A$1:$レアリティ番号.$B$4];2;0)" office:value-type="float" office:value="1" calcext:value-type="float">
            <text:p>1</text:p>
          </table:table-cell>
          <table:table-cell office:value-type="string" calcext:value-type="string">
            <text:p>イジン</text:p>
          </table:table-cell>
          <table:table-cell table:formula="of:=VLOOKUP([.K35];[$種類番号.$A$1:$種類番号.$B$4];2;0)" office:value-type="float" office:value="1" calcext:value-type="float">
            <text:p>1</text:p>
          </table:table-cell>
          <table:table-cell office:value-type="string" calcext:value-type="string">
            <text:p>緑</text:p>
          </table:table-cell>
          <table:table-cell table:formula="of:=VLOOKUP([.M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office:value-type="float" office:value="7000" calcext:value-type="float">
            <text:p>7000</text:p>
          </table:table-cell>
          <table:table-cell table:style-name="ce8" office:value-type="string" calcext:value-type="string">
            <text:p>魔力化</text:p>
          </table:table-cell>
          <table:table-cell table:formula="of:=IFERROR(VLOOKUP([.$W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IF(ISNA([.$S35]);&quot;null&quot;;&quot;&quot;&quot;&quot;&amp;[.$S35]&amp;&quot;&quot;&quot;&quot;);[$JSON.$E$1];[.$U35];[$JSON.$F$1];IF(ISNA([.$W35]);&quot;null&quot;;&quot;&quot;&quot;&quot;&amp;[.$W35]&amp;&quot;&quot;&quot;&quot;);[$JSON.$G$1];[.$Y35];[$JSON.$H$1];[.$H35];[$JSON.$I$1];[.J35];[$JSON.$J$1];[.$L35];[$JSON.$K$1];[.$O35];[$JSON.$L$1];[.$N35];[$JSON.$M$1];[.$R35];[$JSON.$N$1];[.$T35];[$JSON.$O$1];IF(ISNA([.$V35]);&quot;null&quot;;[.$V35]);[$JSON.$P$1];[.$X35];[$JSON.$Q$1];[.$A35];[$JSON.$R$1];[.$B35];[$JSON.$S$1])" office:value-type="string" office:string-value="{&quot;id&quot;:&quot;G-8&quot;,&quot;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orderTable&quot;:34,&quot;orderDeck&quot;:221}," calcext:value-type="string">
            <text:p>{"id":"G-8","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G36];[$収録番号.$A$1:$収録番号.$B$9];2;0)" office:value-type="float" office:value="12" calcext:value-type="float">
            <text:p>12</text:p>
          </table:table-cell>
          <table:table-cell office:value-type="string" calcext:value-type="string">
            <text:p>N</text:p>
          </table:table-cell>
          <table:table-cell table:formula="of:=VLOOKUP([.I36];[$レアリティ番号.$A$1:$レアリティ番号.$B$4];2;0)" office:value-type="float" office:value="1" calcext:value-type="float">
            <text:p>1</text:p>
          </table:table-cell>
          <table:table-cell office:value-type="string" calcext:value-type="string">
            <text:p>ハイケイ</text:p>
          </table:table-cell>
          <table:table-cell table:formula="of:=VLOOKUP([.K36];[$種類番号.$A$1:$種類番号.$B$4];2;0)" office:value-type="float" office:value="2" calcext:value-type="float">
            <text:p>2</text:p>
          </table:table-cell>
          <table:table-cell office:value-type="string" calcext:value-type="string">
            <text:p>緑</text:p>
          </table:table-cell>
          <table:table-cell table:formula="of:=VLOOKUP([.M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IF(ISNA([.$S36]);&quot;null&quot;;&quot;&quot;&quot;&quot;&amp;[.$S36]&amp;&quot;&quot;&quot;&quot;);[$JSON.$E$1];[.$U36];[$JSON.$F$1];IF(ISNA([.$W36]);&quot;null&quot;;&quot;&quot;&quot;&quot;&amp;[.$W36]&amp;&quot;&quot;&quot;&quot;);[$JSON.$G$1];[.$Y36];[$JSON.$H$1];[.$H36];[$JSON.$I$1];[.J36];[$JSON.$J$1];[.$L36];[$JSON.$K$1];[.$O36];[$JSON.$L$1];[.$N36];[$JSON.$M$1];[.$R36];[$JSON.$N$1];[.$T36];[$JSON.$O$1];IF(ISNA([.$V36]);&quot;null&quot;;[.$V36]);[$JSON.$P$1];[.$X36];[$JSON.$Q$1];[.$A36];[$JSON.$R$1];[.$B36];[$JSON.$S$1])" office:value-type="string" office:string-value="{&quot;id&quot;:&quot;G-9&quot;,&quot;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orderTable&quot;:35,&quot;orderDeck&quot;:263}," calcext:value-type="string">
            <text:p>{"id":"G-9","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G37];[$収録番号.$A$1:$収録番号.$B$9];2;0)" office:value-type="float" office:value="12" calcext:value-type="float">
            <text:p>12</text:p>
          </table:table-cell>
          <table:table-cell office:value-type="string" calcext:value-type="string">
            <text:p>N</text:p>
          </table:table-cell>
          <table:table-cell table:formula="of:=VLOOKUP([.I37];[$レアリティ番号.$A$1:$レアリティ番号.$B$4];2;0)" office:value-type="float" office:value="1" calcext:value-type="float">
            <text:p>1</text:p>
          </table:table-cell>
          <table:table-cell office:value-type="string" calcext:value-type="string">
            <text:p>ハイケイ</text:p>
          </table:table-cell>
          <table:table-cell table:formula="of:=VLOOKUP([.K37];[$種類番号.$A$1:$種類番号.$B$4];2;0)" office:value-type="float" office:value="2" calcext:value-type="float">
            <text:p>2</text:p>
          </table:table-cell>
          <table:table-cell office:value-type="string" calcext:value-type="string">
            <text:p>緑</text:p>
          </table:table-cell>
          <table:table-cell table:formula="of:=VLOOKUP([.M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IF(ISNA([.$S37]);&quot;null&quot;;&quot;&quot;&quot;&quot;&amp;[.$S37]&amp;&quot;&quot;&quot;&quot;);[$JSON.$E$1];[.$U37];[$JSON.$F$1];IF(ISNA([.$W37]);&quot;null&quot;;&quot;&quot;&quot;&quot;&amp;[.$W37]&amp;&quot;&quot;&quot;&quot;);[$JSON.$G$1];[.$Y37];[$JSON.$H$1];[.$H37];[$JSON.$I$1];[.J37];[$JSON.$J$1];[.$L37];[$JSON.$K$1];[.$O37];[$JSON.$L$1];[.$N37];[$JSON.$M$1];[.$R37];[$JSON.$N$1];[.$T37];[$JSON.$O$1];IF(ISNA([.$V37]);&quot;null&quot;;[.$V37]);[$JSON.$P$1];[.$X37];[$JSON.$Q$1];[.$A37];[$JSON.$R$1];[.$B37];[$JSON.$S$1])" office:value-type="string" office:string-value="{&quot;id&quot;:&quot;G-10&quot;,&quot;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orderTable&quot;:36,&quot;orderDeck&quot;:276}," calcext:value-type="string">
            <text:p>{"id":"G-10","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G38];[$収録番号.$A$1:$収録番号.$B$9];2;0)" office:value-type="float" office:value="12" calcext:value-type="float">
            <text:p>12</text:p>
          </table:table-cell>
          <table:table-cell office:value-type="string" calcext:value-type="string">
            <text:p>N</text:p>
          </table:table-cell>
          <table:table-cell table:formula="of:=VLOOKUP([.I38];[$レアリティ番号.$A$1:$レアリティ番号.$B$4];2;0)" office:value-type="float" office:value="1" calcext:value-type="float">
            <text:p>1</text:p>
          </table:table-cell>
          <table:table-cell office:value-type="string" calcext:value-type="string">
            <text:p>マホウ</text:p>
          </table:table-cell>
          <table:table-cell table:formula="of:=VLOOKUP([.K38];[$種類番号.$A$1:$種類番号.$B$4];2;0)" office:value-type="float" office:value="3" calcext:value-type="float">
            <text:p>3</text:p>
          </table:table-cell>
          <table:table-cell office:value-type="string" calcext:value-type="string">
            <text:p>緑</text:p>
          </table:table-cell>
          <table:table-cell table:formula="of:=VLOOKUP([.M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IF(ISNA([.$S38]);&quot;null&quot;;&quot;&quot;&quot;&quot;&amp;[.$S38]&amp;&quot;&quot;&quot;&quot;);[$JSON.$E$1];[.$U38];[$JSON.$F$1];IF(ISNA([.$W38]);&quot;null&quot;;&quot;&quot;&quot;&quot;&amp;[.$W38]&amp;&quot;&quot;&quot;&quot;);[$JSON.$G$1];[.$Y38];[$JSON.$H$1];[.$H38];[$JSON.$I$1];[.J38];[$JSON.$J$1];[.$L38];[$JSON.$K$1];[.$O38];[$JSON.$L$1];[.$N38];[$JSON.$M$1];[.$R38];[$JSON.$N$1];[.$T38];[$JSON.$O$1];IF(ISNA([.$V38]);&quot;null&quot;;[.$V38]);[$JSON.$P$1];[.$X38];[$JSON.$Q$1];[.$A38];[$JSON.$R$1];[.$B38];[$JSON.$S$1])" office:value-type="string" office:string-value="{&quot;id&quot;:&quot;G-11&quot;,&quot;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orderTable&quot;:37,&quot;orderDeck&quot;:309}," calcext:value-type="string">
            <text:p>{"id":"G-11","name":"グロウ","kana":"ぐろう","traitText":null,"ruleText":"自分の山札の上から1枚を、裏のまま魔力ゾーンに置く。","legacyText":"冥府発動","imageUrl":"https://one-draw.jp/ijinden/cardlist/G01/card/G_011.png","expansion":12,"rarity":1,"type":3,"level":3,"color":4,"term":0,"trait":0,"power":null,"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G39];[$収録番号.$A$1:$収録番号.$B$9];2;0)" office:value-type="float" office:value="12" calcext:value-type="float">
            <text:p>12</text:p>
          </table:table-cell>
          <table:table-cell office:value-type="string" calcext:value-type="string">
            <text:p>N</text:p>
          </table:table-cell>
          <table:table-cell table:formula="of:=VLOOKUP([.I39];[$レアリティ番号.$A$1:$レアリティ番号.$B$4];2;0)" office:value-type="float" office:value="1" calcext:value-type="float">
            <text:p>1</text:p>
          </table:table-cell>
          <table:table-cell office:value-type="string" calcext:value-type="string">
            <text:p>マホウ</text:p>
          </table:table-cell>
          <table:table-cell table:formula="of:=VLOOKUP([.K39];[$種類番号.$A$1:$種類番号.$B$4];2;0)" office:value-type="float" office:value="3" calcext:value-type="float">
            <text:p>3</text:p>
          </table:table-cell>
          <table:table-cell office:value-type="string" calcext:value-type="string">
            <text:p>緑</text:p>
          </table:table-cell>
          <table:table-cell table:formula="of:=VLOOKUP([.M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IF(ISNA([.$S39]);&quot;null&quot;;&quot;&quot;&quot;&quot;&amp;[.$S39]&amp;&quot;&quot;&quot;&quot;);[$JSON.$E$1];[.$U39];[$JSON.$F$1];IF(ISNA([.$W39]);&quot;null&quot;;&quot;&quot;&quot;&quot;&amp;[.$W39]&amp;&quot;&quot;&quot;&quot;);[$JSON.$G$1];[.$Y39];[$JSON.$H$1];[.$H39];[$JSON.$I$1];[.J39];[$JSON.$J$1];[.$L39];[$JSON.$K$1];[.$O39];[$JSON.$L$1];[.$N39];[$JSON.$M$1];[.$R39];[$JSON.$N$1];[.$T39];[$JSON.$O$1];IF(ISNA([.$V39]);&quot;null&quot;;[.$V39]);[$JSON.$P$1];[.$X39];[$JSON.$Q$1];[.$A39];[$JSON.$R$1];[.$B39];[$JSON.$S$1])" office:value-type="string" office:string-value="{&quot;id&quot;:&quot;G-12&quot;,&quot;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orderTable&quot;:38,&quot;orderDeck&quot;:328}," calcext:value-type="string">
            <text:p>{"id":"G-12","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G40];[$収録番号.$A$1:$収録番号.$B$9];2;0)" office:value-type="float" office:value="12" calcext:value-type="float">
            <text:p>12</text:p>
          </table:table-cell>
          <table:table-cell office:value-type="string" calcext:value-type="string">
            <text:p>N</text:p>
          </table:table-cell>
          <table:table-cell table:formula="of:=VLOOKUP([.I40];[$レアリティ番号.$A$1:$レアリティ番号.$B$4];2;0)" office:value-type="float" office:value="1" calcext:value-type="float">
            <text:p>1</text:p>
          </table:table-cell>
          <table:table-cell office:value-type="string" calcext:value-type="string">
            <text:p>マリョク</text:p>
          </table:table-cell>
          <table:table-cell table:formula="of:=VLOOKUP([.K40];[$種類番号.$A$1:$種類番号.$B$4];2;0)" office:value-type="float" office:value="4" calcext:value-type="float">
            <text:p>4</text:p>
          </table:table-cell>
          <table:table-cell office:value-type="string" calcext:value-type="string">
            <text:p>緑</text:p>
          </table:table-cell>
          <table:table-cell table:formula="of:=VLOOKUP([.M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0];[$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IF(ISNA([.$S40]);&quot;null&quot;;&quot;&quot;&quot;&quot;&amp;[.$S40]&amp;&quot;&quot;&quot;&quot;);[$JSON.$E$1];[.$U40];[$JSON.$F$1];IF(ISNA([.$W40]);&quot;null&quot;;&quot;&quot;&quot;&quot;&amp;[.$W40]&amp;&quot;&quot;&quot;&quot;);[$JSON.$G$1];[.$Y40];[$JSON.$H$1];[.$H40];[$JSON.$I$1];[.J40];[$JSON.$J$1];[.$L40];[$JSON.$K$1];[.$O40];[$JSON.$L$1];[.$N40];[$JSON.$M$1];[.$R40];[$JSON.$N$1];[.$T40];[$JSON.$O$1];IF(ISNA([.$V40]);&quot;null&quot;;[.$V40]);[$JSON.$P$1];[.$X40];[$JSON.$Q$1];[.$A40];[$JSON.$R$1];[.$B40];[$JSON.$S$1])" office:value-type="string" office:string-value="{&quot;id&quot;:&quot;G-13&quot;,&quot;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orderTable&quot;:39,&quot;orderDeck&quot;:355}," calcext:value-type="string">
            <text:p>{"id":"G-13","name":"グリーンストーン","kana":"ぐりーんすとーん","traitText":null,"ruleText":"※デッキに何枚でも入れてよい。","legacyText":"復元","imageUrl":"https://one-draw.jp/ijinden/cardlist/G01/card/G_013.png","expansion":12,"rarity":1,"type":4,"level":1,"color":4,"term":0,"trait":0,"power":null,"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G41];[$収録番号.$A$1:$収録番号.$B$9];2;0)" office:value-type="float" office:value="15" calcext:value-type="float">
            <text:p>15</text:p>
          </table:table-cell>
          <table:table-cell office:value-type="string" calcext:value-type="string">
            <text:p>SR</text:p>
          </table:table-cell>
          <table:table-cell table:formula="of:=VLOOKUP([.I41];[$レアリティ番号.$A$1:$レアリティ番号.$B$4];2;0)" office:value-type="float" office:value="4" calcext:value-type="float">
            <text:p>4</text:p>
          </table:table-cell>
          <table:table-cell office:value-type="string" calcext:value-type="string">
            <text:p>イジン</text:p>
          </table:table-cell>
          <table:table-cell table:formula="of:=VLOOKUP([.K41];[$種類番号.$A$1:$種類番号.$B$4];2;0)" office:value-type="float" office:value="1" calcext:value-type="float">
            <text:p>1</text:p>
          </table:table-cell>
          <table:table-cell office:value-type="string" calcext:value-type="string">
            <text:p>赤</text:p>
          </table:table-cell>
          <table:table-cell table:formula="of:=VLOOKUP([.M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IF(ISNA([.$S41]);&quot;null&quot;;&quot;&quot;&quot;&quot;&amp;[.$S41]&amp;&quot;&quot;&quot;&quot;);[$JSON.$E$1];[.$U41];[$JSON.$F$1];IF(ISNA([.$W41]);&quot;null&quot;;&quot;&quot;&quot;&quot;&amp;[.$W41]&amp;&quot;&quot;&quot;&quot;);[$JSON.$G$1];[.$Y41];[$JSON.$H$1];[.$H41];[$JSON.$I$1];[.J41];[$JSON.$J$1];[.$L41];[$JSON.$K$1];[.$O41];[$JSON.$L$1];[.$N41];[$JSON.$M$1];[.$R41];[$JSON.$N$1];[.$T41];[$JSON.$O$1];IF(ISNA([.$V41]);&quot;null&quot;;[.$V41]);[$JSON.$P$1];[.$X41];[$JSON.$Q$1];[.$A41];[$JSON.$R$1];[.$B41];[$JSON.$S$1])" office:value-type="string" office:string-value="{&quot;id&quot;:&quot;1-1&quot;,&quot;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orderTable&quot;:40,&quot;orderDeck&quot;:107}," calcext:value-type="string">
            <text:p>{"id":"1-1","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G42];[$収録番号.$A$1:$収録番号.$B$9];2;0)" office:value-type="float" office:value="15" calcext:value-type="float">
            <text:p>15</text:p>
          </table:table-cell>
          <table:table-cell office:value-type="string" calcext:value-type="string">
            <text:p>SR</text:p>
          </table:table-cell>
          <table:table-cell table:formula="of:=VLOOKUP([.I42];[$レアリティ番号.$A$1:$レアリティ番号.$B$4];2;0)" office:value-type="float" office:value="4" calcext:value-type="float">
            <text:p>4</text:p>
          </table:table-cell>
          <table:table-cell office:value-type="string" calcext:value-type="string">
            <text:p>イジン</text:p>
          </table:table-cell>
          <table:table-cell table:formula="of:=VLOOKUP([.K42];[$種類番号.$A$1:$種類番号.$B$4];2;0)" office:value-type="float" office:value="1" calcext:value-type="float">
            <text:p>1</text:p>
          </table:table-cell>
          <table:table-cell office:value-type="string" calcext:value-type="string">
            <text:p>赤</text:p>
          </table:table-cell>
          <table:table-cell table:formula="of:=VLOOKUP([.M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IF(ISNA([.$S42]);&quot;null&quot;;&quot;&quot;&quot;&quot;&amp;[.$S42]&amp;&quot;&quot;&quot;&quot;);[$JSON.$E$1];[.$U42];[$JSON.$F$1];IF(ISNA([.$W42]);&quot;null&quot;;&quot;&quot;&quot;&quot;&amp;[.$W42]&amp;&quot;&quot;&quot;&quot;);[$JSON.$G$1];[.$Y42];[$JSON.$H$1];[.$H42];[$JSON.$I$1];[.J42];[$JSON.$J$1];[.$L42];[$JSON.$K$1];[.$O42];[$JSON.$L$1];[.$N42];[$JSON.$M$1];[.$R42];[$JSON.$N$1];[.$T42];[$JSON.$O$1];IF(ISNA([.$V42]);&quot;null&quot;;[.$V42]);[$JSON.$P$1];[.$X42];[$JSON.$Q$1];[.$A42];[$JSON.$R$1];[.$B42];[$JSON.$S$1])" office:value-type="string" office:string-value="{&quot;id&quot;:&quot;1-2&quot;,&quot;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orderTable&quot;:41,&quot;orderDeck&quot;:145}," calcext:value-type="string">
            <text:p>{"id":"1-2","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G43];[$収録番号.$A$1:$収録番号.$B$9];2;0)" office:value-type="float" office:value="15" calcext:value-type="float">
            <text:p>15</text:p>
          </table:table-cell>
          <table:table-cell office:value-type="string" calcext:value-type="string">
            <text:p>SR</text:p>
          </table:table-cell>
          <table:table-cell table:formula="of:=VLOOKUP([.I43];[$レアリティ番号.$A$1:$レアリティ番号.$B$4];2;0)" office:value-type="float" office:value="4" calcext:value-type="float">
            <text:p>4</text:p>
          </table:table-cell>
          <table:table-cell office:value-type="string" calcext:value-type="string">
            <text:p>イジン</text:p>
          </table:table-cell>
          <table:table-cell table:formula="of:=VLOOKUP([.K43];[$種類番号.$A$1:$種類番号.$B$4];2;0)" office:value-type="float" office:value="1" calcext:value-type="float">
            <text:p>1</text:p>
          </table:table-cell>
          <table:table-cell office:value-type="string" calcext:value-type="string">
            <text:p>青</text:p>
          </table:table-cell>
          <table:table-cell table:formula="of:=VLOOKUP([.M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IF(ISNA([.$S43]);&quot;null&quot;;&quot;&quot;&quot;&quot;&amp;[.$S43]&amp;&quot;&quot;&quot;&quot;);[$JSON.$E$1];[.$U43];[$JSON.$F$1];IF(ISNA([.$W43]);&quot;null&quot;;&quot;&quot;&quot;&quot;&amp;[.$W43]&amp;&quot;&quot;&quot;&quot;);[$JSON.$G$1];[.$Y43];[$JSON.$H$1];[.$H43];[$JSON.$I$1];[.J43];[$JSON.$J$1];[.$L43];[$JSON.$K$1];[.$O43];[$JSON.$L$1];[.$N43];[$JSON.$M$1];[.$R43];[$JSON.$N$1];[.$T43];[$JSON.$O$1];IF(ISNA([.$V43]);&quot;null&quot;;[.$V43]);[$JSON.$P$1];[.$X43];[$JSON.$Q$1];[.$A43];[$JSON.$R$1];[.$B43];[$JSON.$S$1])" office:value-type="string" office:string-value="{&quot;id&quot;:&quot;1-3&quot;,&quot;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orderTable&quot;:42,&quot;orderDeck&quot;:77}," calcext:value-type="string">
            <text:p>{"id":"1-3","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G44];[$収録番号.$A$1:$収録番号.$B$9];2;0)" office:value-type="float" office:value="15" calcext:value-type="float">
            <text:p>15</text:p>
          </table:table-cell>
          <table:table-cell office:value-type="string" calcext:value-type="string">
            <text:p>SR</text:p>
          </table:table-cell>
          <table:table-cell table:formula="of:=VLOOKUP([.I44];[$レアリティ番号.$A$1:$レアリティ番号.$B$4];2;0)" office:value-type="float" office:value="4" calcext:value-type="float">
            <text:p>4</text:p>
          </table:table-cell>
          <table:table-cell office:value-type="string" calcext:value-type="string">
            <text:p>イジン</text:p>
          </table:table-cell>
          <table:table-cell table:formula="of:=VLOOKUP([.K44];[$種類番号.$A$1:$種類番号.$B$4];2;0)" office:value-type="float" office:value="1" calcext:value-type="float">
            <text:p>1</text:p>
          </table:table-cell>
          <table:table-cell office:value-type="string" calcext:value-type="string">
            <text:p>青</text:p>
          </table:table-cell>
          <table:table-cell table:formula="of:=VLOOKUP([.M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IF(ISNA([.$S44]);&quot;null&quot;;&quot;&quot;&quot;&quot;&amp;[.$S44]&amp;&quot;&quot;&quot;&quot;);[$JSON.$E$1];[.$U44];[$JSON.$F$1];IF(ISNA([.$W44]);&quot;null&quot;;&quot;&quot;&quot;&quot;&amp;[.$W44]&amp;&quot;&quot;&quot;&quot;);[$JSON.$G$1];[.$Y44];[$JSON.$H$1];[.$H44];[$JSON.$I$1];[.J44];[$JSON.$J$1];[.$L44];[$JSON.$K$1];[.$O44];[$JSON.$L$1];[.$N44];[$JSON.$M$1];[.$R44];[$JSON.$N$1];[.$T44];[$JSON.$O$1];IF(ISNA([.$V44]);&quot;null&quot;;[.$V44]);[$JSON.$P$1];[.$X44];[$JSON.$Q$1];[.$A44];[$JSON.$R$1];[.$B44];[$JSON.$S$1])" office:value-type="string" office:string-value="{&quot;id&quot;:&quot;1-4&quot;,&quot;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orderTable&quot;:43,&quot;orderDeck&quot;:187}," calcext:value-type="string">
            <text:p>{"id":"1-4","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G45];[$収録番号.$A$1:$収録番号.$B$9];2;0)" office:value-type="float" office:value="15" calcext:value-type="float">
            <text:p>15</text:p>
          </table:table-cell>
          <table:table-cell office:value-type="string" calcext:value-type="string">
            <text:p>SR</text:p>
          </table:table-cell>
          <table:table-cell table:formula="of:=VLOOKUP([.I45];[$レアリティ番号.$A$1:$レアリティ番号.$B$4];2;0)" office:value-type="float" office:value="4" calcext:value-type="float">
            <text:p>4</text:p>
          </table:table-cell>
          <table:table-cell office:value-type="string" calcext:value-type="string">
            <text:p>イジン</text:p>
          </table:table-cell>
          <table:table-cell table:formula="of:=VLOOKUP([.K45];[$種類番号.$A$1:$種類番号.$B$4];2;0)" office:value-type="float" office:value="1" calcext:value-type="float">
            <text:p>1</text:p>
          </table:table-cell>
          <table:table-cell office:value-type="string" calcext:value-type="string">
            <text:p>緑</text:p>
          </table:table-cell>
          <table:table-cell table:formula="of:=VLOOKUP([.M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5];[$能力語番号.$A$1:$能力語番号.$B$10];2;0);0)" office:value-type="float" office:value="0" calcext:value-type="float">
            <text:p>0</text:p>
          </table:table-cell>
          <table:table-cell office:value-type="string" calcext:value-type="string">
            <text:p>音楽</text:p>
          </table:table-cell>
          <table:table-cell table:formula="of:=IFERROR(VLOOKUP([.$S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IF(ISNA([.$S45]);&quot;null&quot;;&quot;&quot;&quot;&quot;&amp;[.$S45]&amp;&quot;&quot;&quot;&quot;);[$JSON.$E$1];[.$U45];[$JSON.$F$1];IF(ISNA([.$W45]);&quot;null&quot;;&quot;&quot;&quot;&quot;&amp;[.$W45]&amp;&quot;&quot;&quot;&quot;);[$JSON.$G$1];[.$Y45];[$JSON.$H$1];[.$H45];[$JSON.$I$1];[.J45];[$JSON.$J$1];[.$L45];[$JSON.$K$1];[.$O45];[$JSON.$L$1];[.$N45];[$JSON.$M$1];[.$R45];[$JSON.$N$1];[.$T45];[$JSON.$O$1];IF(ISNA([.$V45]);&quot;null&quot;;[.$V45]);[$JSON.$P$1];[.$X45];[$JSON.$Q$1];[.$A45];[$JSON.$R$1];[.$B45];[$JSON.$S$1])" office:value-type="string" office:string-value="{&quot;id&quot;:&quot;1-5&quot;,&quot;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orderTable&quot;:44,&quot;orderDeck&quot;:208}," calcext:value-type="string">
            <text:p>{"id":"1-5","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G46];[$収録番号.$A$1:$収録番号.$B$9];2;0)" office:value-type="float" office:value="15" calcext:value-type="float">
            <text:p>15</text:p>
          </table:table-cell>
          <table:table-cell office:value-type="string" calcext:value-type="string">
            <text:p>SR</text:p>
          </table:table-cell>
          <table:table-cell table:formula="of:=VLOOKUP([.I46];[$レアリティ番号.$A$1:$レアリティ番号.$B$4];2;0)" office:value-type="float" office:value="4" calcext:value-type="float">
            <text:p>4</text:p>
          </table:table-cell>
          <table:table-cell office:value-type="string" calcext:value-type="string">
            <text:p>イジン</text:p>
          </table:table-cell>
          <table:table-cell table:formula="of:=VLOOKUP([.K46];[$種類番号.$A$1:$種類番号.$B$4];2;0)" office:value-type="float" office:value="1" calcext:value-type="float">
            <text:p>1</text:p>
          </table:table-cell>
          <table:table-cell office:value-type="string" calcext:value-type="string">
            <text:p>緑</text:p>
          </table:table-cell>
          <table:table-cell table:formula="of:=VLOOKUP([.M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office:value-type="float" office:value="6000" calcext:value-type="float">
            <text:p>6000</text:p>
          </table:table-cell>
          <table:table-cell table:style-name="ce8" office:value-type="string" calcext:value-type="string">
            <text:p>魔力化</text:p>
          </table:table-cell>
          <table:table-cell table:formula="of:=IFERROR(VLOOKUP([.$W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IF(ISNA([.$S46]);&quot;null&quot;;&quot;&quot;&quot;&quot;&amp;[.$S46]&amp;&quot;&quot;&quot;&quot;);[$JSON.$E$1];[.$U46];[$JSON.$F$1];IF(ISNA([.$W46]);&quot;null&quot;;&quot;&quot;&quot;&quot;&amp;[.$W46]&amp;&quot;&quot;&quot;&quot;);[$JSON.$G$1];[.$Y46];[$JSON.$H$1];[.$H46];[$JSON.$I$1];[.J46];[$JSON.$J$1];[.$L46];[$JSON.$K$1];[.$O46];[$JSON.$L$1];[.$N46];[$JSON.$M$1];[.$R46];[$JSON.$N$1];[.$T46];[$JSON.$O$1];IF(ISNA([.$V46]);&quot;null&quot;;[.$V46]);[$JSON.$P$1];[.$X46];[$JSON.$Q$1];[.$A46];[$JSON.$R$1];[.$B46];[$JSON.$S$1])" office:value-type="string" office:string-value="{&quot;id&quot;:&quot;1-6&quot;,&quot;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orderTable&quot;:45,&quot;orderDeck&quot;:222}," calcext:value-type="string">
            <text:p>{"id":"1-6","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G47];[$収録番号.$A$1:$収録番号.$B$9];2;0)" office:value-type="float" office:value="15" calcext:value-type="float">
            <text:p>15</text:p>
          </table:table-cell>
          <table:table-cell office:value-type="string" calcext:value-type="string">
            <text:p>N</text:p>
          </table:table-cell>
          <table:table-cell table:formula="of:=VLOOKUP([.I47];[$レアリティ番号.$A$1:$レアリティ番号.$B$4];2;0)" office:value-type="float" office:value="1" calcext:value-type="float">
            <text:p>1</text:p>
          </table:table-cell>
          <table:table-cell office:value-type="string" calcext:value-type="string">
            <text:p>イジン</text:p>
          </table:table-cell>
          <table:table-cell table:formula="of:=VLOOKUP([.K47];[$種類番号.$A$1:$種類番号.$B$4];2;0)" office:value-type="float" office:value="1" calcext:value-type="float">
            <text:p>1</text:p>
          </table:table-cell>
          <table:table-cell office:value-type="string" calcext:value-type="string">
            <text:p>赤</text:p>
          </table:table-cell>
          <table:table-cell table:formula="of:=VLOOKUP([.M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47];[$特性番号.$A$1:$特性番号.$B$8];2;0);0)" office:value-type="float" office:value="0" calcext:value-type="float">
            <text:p>0</text:p>
          </table:table-cell>
          <table:table-cell office:value-type="string" calcext:value-type="string">
            <text:p>戦場に他の赤のイジンがいる間「即応」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IF(ISNA([.$S47]);&quot;null&quot;;&quot;&quot;&quot;&quot;&amp;[.$S47]&amp;&quot;&quot;&quot;&quot;);[$JSON.$E$1];[.$U47];[$JSON.$F$1];IF(ISNA([.$W47]);&quot;null&quot;;&quot;&quot;&quot;&quot;&amp;[.$W47]&amp;&quot;&quot;&quot;&quot;);[$JSON.$G$1];[.$Y47];[$JSON.$H$1];[.$H47];[$JSON.$I$1];[.J47];[$JSON.$J$1];[.$L47];[$JSON.$K$1];[.$O47];[$JSON.$L$1];[.$N47];[$JSON.$M$1];[.$R47];[$JSON.$N$1];[.$T47];[$JSON.$O$1];IF(ISNA([.$V47]);&quot;null&quot;;[.$V47]);[$JSON.$P$1];[.$X47];[$JSON.$Q$1];[.$A47];[$JSON.$R$1];[.$B47];[$JSON.$S$1])" office:value-type="string" office:string-value="{&quot;id&quot;:&quot;1-7&quot;,&quot;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orderTable&quot;:46,&quot;orderDeck&quot;:2}," calcext:value-type="string">
            <text:p>{"id":"1-7","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G48];[$収録番号.$A$1:$収録番号.$B$9];2;0)" office:value-type="float" office:value="15" calcext:value-type="float">
            <text:p>15</text:p>
          </table:table-cell>
          <table:table-cell office:value-type="string" calcext:value-type="string">
            <text:p>N</text:p>
          </table:table-cell>
          <table:table-cell table:formula="of:=VLOOKUP([.I48];[$レアリティ番号.$A$1:$レアリティ番号.$B$4];2;0)" office:value-type="float" office:value="1" calcext:value-type="float">
            <text:p>1</text:p>
          </table:table-cell>
          <table:table-cell office:value-type="string" calcext:value-type="string">
            <text:p>イジン</text:p>
          </table:table-cell>
          <table:table-cell table:formula="of:=VLOOKUP([.K48];[$種類番号.$A$1:$種類番号.$B$4];2;0)" office:value-type="float" office:value="1" calcext:value-type="float">
            <text:p>1</text:p>
          </table:table-cell>
          <table:table-cell office:value-type="string" calcext:value-type="string">
            <text:p>赤</text:p>
          </table:table-cell>
          <table:table-cell table:formula="of:=VLOOKUP([.M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48];[$能力語番号.$A$1:$能力語番号.$B$10];2;0);0)" office:value-type="float" office:value="0" calcext:value-type="float">
            <text:p>0</text:p>
          </table:table-cell>
          <table:table-cell office:value-type="string" calcext:value-type="string">
            <text:p>剣術</text:p>
          </table:table-cell>
          <table:table-cell table:formula="of:=IFERROR(VLOOKUP([.$S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IF(ISNA([.$S48]);&quot;null&quot;;&quot;&quot;&quot;&quot;&amp;[.$S48]&amp;&quot;&quot;&quot;&quot;);[$JSON.$E$1];[.$U48];[$JSON.$F$1];IF(ISNA([.$W48]);&quot;null&quot;;&quot;&quot;&quot;&quot;&amp;[.$W48]&amp;&quot;&quot;&quot;&quot;);[$JSON.$G$1];[.$Y48];[$JSON.$H$1];[.$H48];[$JSON.$I$1];[.J48];[$JSON.$J$1];[.$L48];[$JSON.$K$1];[.$O48];[$JSON.$L$1];[.$N48];[$JSON.$M$1];[.$R48];[$JSON.$N$1];[.$T48];[$JSON.$O$1];IF(ISNA([.$V48]);&quot;null&quot;;[.$V48]);[$JSON.$P$1];[.$X48];[$JSON.$Q$1];[.$A48];[$JSON.$R$1];[.$B48];[$JSON.$S$1])" office:value-type="string" office:string-value="{&quot;id&quot;:&quot;1-8&quot;,&quot;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orderTable&quot;:47,&quot;orderDeck&quot;:25}," calcext:value-type="string">
            <text:p>{"id":"1-8","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G49];[$収録番号.$A$1:$収録番号.$B$9];2;0)" office:value-type="float" office:value="15" calcext:value-type="float">
            <text:p>15</text:p>
          </table:table-cell>
          <table:table-cell office:value-type="string" calcext:value-type="string">
            <text:p>N</text:p>
          </table:table-cell>
          <table:table-cell table:formula="of:=VLOOKUP([.I49];[$レアリティ番号.$A$1:$レアリティ番号.$B$4];2;0)" office:value-type="float" office:value="1" calcext:value-type="float">
            <text:p>1</text:p>
          </table:table-cell>
          <table:table-cell office:value-type="string" calcext:value-type="string">
            <text:p>イジン</text:p>
          </table:table-cell>
          <table:table-cell table:formula="of:=VLOOKUP([.K49];[$種類番号.$A$1:$種類番号.$B$4];2;0)" office:value-type="float" office:value="1" calcext:value-type="float">
            <text:p>1</text:p>
          </table:table-cell>
          <table:table-cell office:value-type="string" calcext:value-type="string">
            <text:p>赤</text:p>
          </table:table-cell>
          <table:table-cell table:formula="of:=VLOOKUP([.M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49];[$能力語番号.$A$1:$能力語番号.$B$10];2;0);0)" office:value-type="float" office:value="1" calcext:value-type="float">
            <text:p>1</text:p>
          </table:table-cell>
          <table:table-cell office:value-type="string" calcext:value-type="string">
            <text:p>剣術</text:p>
          </table:table-cell>
          <table:table-cell table:formula="of:=IFERROR(VLOOKUP([.$S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IF(ISNA([.$S49]);&quot;null&quot;;&quot;&quot;&quot;&quot;&amp;[.$S49]&amp;&quot;&quot;&quot;&quot;);[$JSON.$E$1];[.$U49];[$JSON.$F$1];IF(ISNA([.$W49]);&quot;null&quot;;&quot;&quot;&quot;&quot;&amp;[.$W49]&amp;&quot;&quot;&quot;&quot;);[$JSON.$G$1];[.$Y49];[$JSON.$H$1];[.$H49];[$JSON.$I$1];[.J49];[$JSON.$J$1];[.$L49];[$JSON.$K$1];[.$O49];[$JSON.$L$1];[.$N49];[$JSON.$M$1];[.$R49];[$JSON.$N$1];[.$T49];[$JSON.$O$1];IF(ISNA([.$V49]);&quot;null&quot;;[.$V49]);[$JSON.$P$1];[.$X49];[$JSON.$Q$1];[.$A49];[$JSON.$R$1];[.$B49];[$JSON.$S$1])" office:value-type="string" office:string-value="{&quot;id&quot;:&quot;1-9&quot;,&quot;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orderTable&quot;:48,&quot;orderDeck&quot;:26}," calcext:value-type="string">
            <text:p>{"id":"1-9","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G50];[$収録番号.$A$1:$収録番号.$B$9];2;0)" office:value-type="float" office:value="15" calcext:value-type="float">
            <text:p>15</text:p>
          </table:table-cell>
          <table:table-cell office:value-type="string" calcext:value-type="string">
            <text:p>N</text:p>
          </table:table-cell>
          <table:table-cell table:formula="of:=VLOOKUP([.I50];[$レアリティ番号.$A$1:$レアリティ番号.$B$4];2;0)" office:value-type="float" office:value="1" calcext:value-type="float">
            <text:p>1</text:p>
          </table:table-cell>
          <table:table-cell office:value-type="string" calcext:value-type="string">
            <text:p>イジン</text:p>
          </table:table-cell>
          <table:table-cell table:formula="of:=VLOOKUP([.K50];[$種類番号.$A$1:$種類番号.$B$4];2;0)" office:value-type="float" office:value="1" calcext:value-type="float">
            <text:p>1</text:p>
          </table:table-cell>
          <table:table-cell office:value-type="string" calcext:value-type="string">
            <text:p>赤</text:p>
          </table:table-cell>
          <table:table-cell table:formula="of:=VLOOKUP([.M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0];[$能力語番号.$A$1:$能力語番号.$B$10];2;0);0)" office:value-type="float" office:value="0" calcext:value-type="float">
            <text:p>0</text:p>
          </table:table-cell>
          <table:table-cell office:value-type="string" calcext:value-type="string">
            <text:p>剣術</text:p>
          </table:table-cell>
          <table:table-cell table:formula="of:=IFERROR(VLOOKUP([.$S50];[$特性番号.$A$1:$特性番号.$B$8];2;0);0)" office:value-type="float" office:value="1" calcext:value-type="float">
            <text:p>1</text:p>
          </table:table-cell>
          <table:table-cell office:value-type="string" calcext:value-type="string">
            <text:p>戦場に置かれたとき、イジン召喚権+1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IF(ISNA([.$S50]);&quot;null&quot;;&quot;&quot;&quot;&quot;&amp;[.$S50]&amp;&quot;&quot;&quot;&quot;);[$JSON.$E$1];[.$U50];[$JSON.$F$1];IF(ISNA([.$W50]);&quot;null&quot;;&quot;&quot;&quot;&quot;&amp;[.$W50]&amp;&quot;&quot;&quot;&quot;);[$JSON.$G$1];[.$Y50];[$JSON.$H$1];[.$H50];[$JSON.$I$1];[.J50];[$JSON.$J$1];[.$L50];[$JSON.$K$1];[.$O50];[$JSON.$L$1];[.$N50];[$JSON.$M$1];[.$R50];[$JSON.$N$1];[.$T50];[$JSON.$O$1];IF(ISNA([.$V50]);&quot;null&quot;;[.$V50]);[$JSON.$P$1];[.$X50];[$JSON.$Q$1];[.$A50];[$JSON.$R$1];[.$B50];[$JSON.$S$1])" office:value-type="string" office:string-value="{&quot;id&quot;:&quot;1-10&quot;,&quot;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orderTable&quot;:49,&quot;orderDeck&quot;:64}," calcext:value-type="string">
            <text:p>{"id":"1-10","name":"徳川家康","kana":"とくがわいえやす","traitText":"剣術","ruleText":"戦場に置かれたとき、イジン召喚権+1する。","legacyText":"1ドローする","imageUrl":"https://one-draw.jp/ijinden/cardlist/001/card/01_010.png","expansion":15,"rarity":1,"type":1,"level":3,"color":1,"term":0,"trait":1,"power":2000,"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G51];[$収録番号.$A$1:$収録番号.$B$9];2;0)" office:value-type="float" office:value="15" calcext:value-type="float">
            <text:p>15</text:p>
          </table:table-cell>
          <table:table-cell office:value-type="string" calcext:value-type="string">
            <text:p>N</text:p>
          </table:table-cell>
          <table:table-cell table:formula="of:=VLOOKUP([.I51];[$レアリティ番号.$A$1:$レアリティ番号.$B$4];2;0)" office:value-type="float" office:value="1" calcext:value-type="float">
            <text:p>1</text:p>
          </table:table-cell>
          <table:table-cell office:value-type="string" calcext:value-type="string">
            <text:p>イジン</text:p>
          </table:table-cell>
          <table:table-cell table:formula="of:=VLOOKUP([.K51];[$種類番号.$A$1:$種類番号.$B$4];2;0)" office:value-type="float" office:value="1" calcext:value-type="float">
            <text:p>1</text:p>
          </table:table-cell>
          <table:table-cell office:value-type="string" calcext:value-type="string">
            <text:p>赤</text:p>
          </table:table-cell>
          <table:table-cell table:formula="of:=VLOOKUP([.M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1];[$能力語番号.$A$1:$能力語番号.$B$10];2;0);0)" office:value-type="float" office:value="0" calcext:value-type="float">
            <text:p>0</text:p>
          </table:table-cell>
          <table:table-cell office:value-type="string" calcext:value-type="string">
            <text:p>剣術</text:p>
          </table:table-cell>
          <table:table-cell table:formula="of:=IFERROR(VLOOKUP([.$S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IF(ISNA([.$S51]);&quot;null&quot;;&quot;&quot;&quot;&quot;&amp;[.$S51]&amp;&quot;&quot;&quot;&quot;);[$JSON.$E$1];[.$U51];[$JSON.$F$1];IF(ISNA([.$W51]);&quot;null&quot;;&quot;&quot;&quot;&quot;&amp;[.$W51]&amp;&quot;&quot;&quot;&quot;);[$JSON.$G$1];[.$Y51];[$JSON.$H$1];[.$H51];[$JSON.$I$1];[.J51];[$JSON.$J$1];[.$L51];[$JSON.$K$1];[.$O51];[$JSON.$L$1];[.$N51];[$JSON.$M$1];[.$R51];[$JSON.$N$1];[.$T51];[$JSON.$O$1];IF(ISNA([.$V51]);&quot;null&quot;;[.$V51]);[$JSON.$P$1];[.$X51];[$JSON.$Q$1];[.$A51];[$JSON.$R$1];[.$B51];[$JSON.$S$1])" office:value-type="string" office:string-value="{&quot;id&quot;:&quot;1-11&quot;,&quot;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orderTable&quot;:50,&quot;orderDeck&quot;:65}," calcext:value-type="string">
            <text:p>{"id":"1-11","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G52];[$収録番号.$A$1:$収録番号.$B$9];2;0)" office:value-type="float" office:value="15" calcext:value-type="float">
            <text:p>15</text:p>
          </table:table-cell>
          <table:table-cell office:value-type="string" calcext:value-type="string">
            <text:p>N</text:p>
          </table:table-cell>
          <table:table-cell table:formula="of:=VLOOKUP([.I52];[$レアリティ番号.$A$1:$レアリティ番号.$B$4];2;0)" office:value-type="float" office:value="1" calcext:value-type="float">
            <text:p>1</text:p>
          </table:table-cell>
          <table:table-cell office:value-type="string" calcext:value-type="string">
            <text:p>イジン</text:p>
          </table:table-cell>
          <table:table-cell table:formula="of:=VLOOKUP([.K52];[$種類番号.$A$1:$種類番号.$B$4];2;0)" office:value-type="float" office:value="1" calcext:value-type="float">
            <text:p>1</text:p>
          </table:table-cell>
          <table:table-cell office:value-type="string" calcext:value-type="string">
            <text:p>赤</text:p>
          </table:table-cell>
          <table:table-cell table:formula="of:=VLOOKUP([.M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IF(ISNA([.$S52]);&quot;null&quot;;&quot;&quot;&quot;&quot;&amp;[.$S52]&amp;&quot;&quot;&quot;&quot;);[$JSON.$E$1];[.$U52];[$JSON.$F$1];IF(ISNA([.$W52]);&quot;null&quot;;&quot;&quot;&quot;&quot;&amp;[.$W52]&amp;&quot;&quot;&quot;&quot;);[$JSON.$G$1];[.$Y52];[$JSON.$H$1];[.$H52];[$JSON.$I$1];[.J52];[$JSON.$J$1];[.$L52];[$JSON.$K$1];[.$O52];[$JSON.$L$1];[.$N52];[$JSON.$M$1];[.$R52];[$JSON.$N$1];[.$T52];[$JSON.$O$1];IF(ISNA([.$V52]);&quot;null&quot;;[.$V52]);[$JSON.$P$1];[.$X52];[$JSON.$Q$1];[.$A52];[$JSON.$R$1];[.$B52];[$JSON.$S$1])" office:value-type="string" office:string-value="{&quot;id&quot;:&quot;1-12&quot;,&quot;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orderTable&quot;:51,&quot;orderDeck&quot;:66}," calcext:value-type="string">
            <text:p>{"id":"1-12","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G53];[$収録番号.$A$1:$収録番号.$B$9];2;0)" office:value-type="float" office:value="15" calcext:value-type="float">
            <text:p>15</text:p>
          </table:table-cell>
          <table:table-cell office:value-type="string" calcext:value-type="string">
            <text:p>R</text:p>
          </table:table-cell>
          <table:table-cell table:formula="of:=VLOOKUP([.I53];[$レアリティ番号.$A$1:$レアリティ番号.$B$4];2;0)" office:value-type="float" office:value="2" calcext:value-type="float">
            <text:p>2</text:p>
          </table:table-cell>
          <table:table-cell office:value-type="string" calcext:value-type="string">
            <text:p>イジン</text:p>
          </table:table-cell>
          <table:table-cell table:formula="of:=VLOOKUP([.K53];[$種類番号.$A$1:$種類番号.$B$4];2;0)" office:value-type="float" office:value="1" calcext:value-type="float">
            <text:p>1</text:p>
          </table:table-cell>
          <table:table-cell office:value-type="string" calcext:value-type="string">
            <text:p>赤</text:p>
          </table:table-cell>
          <table:table-cell table:formula="of:=VLOOKUP([.M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IF(ISNA([.$S53]);&quot;null&quot;;&quot;&quot;&quot;&quot;&amp;[.$S53]&amp;&quot;&quot;&quot;&quot;);[$JSON.$E$1];[.$U53];[$JSON.$F$1];IF(ISNA([.$W53]);&quot;null&quot;;&quot;&quot;&quot;&quot;&amp;[.$W53]&amp;&quot;&quot;&quot;&quot;);[$JSON.$G$1];[.$Y53];[$JSON.$H$1];[.$H53];[$JSON.$I$1];[.J53];[$JSON.$J$1];[.$L53];[$JSON.$K$1];[.$O53];[$JSON.$L$1];[.$N53];[$JSON.$M$1];[.$R53];[$JSON.$N$1];[.$T53];[$JSON.$O$1];IF(ISNA([.$V53]);&quot;null&quot;;[.$V53]);[$JSON.$P$1];[.$X53];[$JSON.$Q$1];[.$A53];[$JSON.$R$1];[.$B53];[$JSON.$S$1])" office:value-type="string" office:string-value="{&quot;id&quot;:&quot;1-13&quot;,&quot;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orderTable&quot;:52,&quot;orderDeck&quot;:67}," calcext:value-type="string">
            <text:p>{"id":"1-13","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G54];[$収録番号.$A$1:$収録番号.$B$9];2;0)" office:value-type="float" office:value="15" calcext:value-type="float">
            <text:p>15</text:p>
          </table:table-cell>
          <table:table-cell office:value-type="string" calcext:value-type="string">
            <text:p>N</text:p>
          </table:table-cell>
          <table:table-cell table:formula="of:=VLOOKUP([.I54];[$レアリティ番号.$A$1:$レアリティ番号.$B$4];2;0)" office:value-type="float" office:value="1" calcext:value-type="float">
            <text:p>1</text:p>
          </table:table-cell>
          <table:table-cell office:value-type="string" calcext:value-type="string">
            <text:p>イジン</text:p>
          </table:table-cell>
          <table:table-cell table:formula="of:=VLOOKUP([.K54];[$種類番号.$A$1:$種類番号.$B$4];2;0)" office:value-type="float" office:value="1" calcext:value-type="float">
            <text:p>1</text:p>
          </table:table-cell>
          <table:table-cell office:value-type="string" calcext:value-type="string">
            <text:p>赤</text:p>
          </table:table-cell>
          <table:table-cell table:formula="of:=VLOOKUP([.M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IF(ISNA([.$S54]);&quot;null&quot;;&quot;&quot;&quot;&quot;&amp;[.$S54]&amp;&quot;&quot;&quot;&quot;);[$JSON.$E$1];[.$U54];[$JSON.$F$1];IF(ISNA([.$W54]);&quot;null&quot;;&quot;&quot;&quot;&quot;&amp;[.$W54]&amp;&quot;&quot;&quot;&quot;);[$JSON.$G$1];[.$Y54];[$JSON.$H$1];[.$H54];[$JSON.$I$1];[.J54];[$JSON.$J$1];[.$L54];[$JSON.$K$1];[.$O54];[$JSON.$L$1];[.$N54];[$JSON.$M$1];[.$R54];[$JSON.$N$1];[.$T54];[$JSON.$O$1];IF(ISNA([.$V54]);&quot;null&quot;;[.$V54]);[$JSON.$P$1];[.$X54];[$JSON.$Q$1];[.$A54];[$JSON.$R$1];[.$B54];[$JSON.$S$1])" office:value-type="string" office:string-value="{&quot;id&quot;:&quot;1-14&quot;,&quot;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orderTable&quot;:53,&quot;orderDeck&quot;:108}," calcext:value-type="string">
            <text:p>{"id":"1-14","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G55];[$収録番号.$A$1:$収録番号.$B$9];2;0)" office:value-type="float" office:value="15" calcext:value-type="float">
            <text:p>15</text:p>
          </table:table-cell>
          <table:table-cell office:value-type="string" calcext:value-type="string">
            <text:p>R</text:p>
          </table:table-cell>
          <table:table-cell table:formula="of:=VLOOKUP([.I55];[$レアリティ番号.$A$1:$レアリティ番号.$B$4];2;0)" office:value-type="float" office:value="2" calcext:value-type="float">
            <text:p>2</text:p>
          </table:table-cell>
          <table:table-cell office:value-type="string" calcext:value-type="string">
            <text:p>イジン</text:p>
          </table:table-cell>
          <table:table-cell table:formula="of:=VLOOKUP([.K55];[$種類番号.$A$1:$種類番号.$B$4];2;0)" office:value-type="float" office:value="1" calcext:value-type="float">
            <text:p>1</text:p>
          </table:table-cell>
          <table:table-cell office:value-type="string" calcext:value-type="string">
            <text:p>赤</text:p>
          </table:table-cell>
          <table:table-cell table:formula="of:=VLOOKUP([.M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IF(ISNA([.$S55]);&quot;null&quot;;&quot;&quot;&quot;&quot;&amp;[.$S55]&amp;&quot;&quot;&quot;&quot;);[$JSON.$E$1];[.$U55];[$JSON.$F$1];IF(ISNA([.$W55]);&quot;null&quot;;&quot;&quot;&quot;&quot;&amp;[.$W55]&amp;&quot;&quot;&quot;&quot;);[$JSON.$G$1];[.$Y55];[$JSON.$H$1];[.$H55];[$JSON.$I$1];[.J55];[$JSON.$J$1];[.$L55];[$JSON.$K$1];[.$O55];[$JSON.$L$1];[.$N55];[$JSON.$M$1];[.$R55];[$JSON.$N$1];[.$T55];[$JSON.$O$1];IF(ISNA([.$V55]);&quot;null&quot;;[.$V55]);[$JSON.$P$1];[.$X55];[$JSON.$Q$1];[.$A55];[$JSON.$R$1];[.$B55];[$JSON.$S$1])" office:value-type="string" office:string-value="{&quot;id&quot;:&quot;1-15&quot;,&quot;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orderTable&quot;:54,&quot;orderDeck&quot;:109}," calcext:value-type="string">
            <text:p>{"id":"1-15","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G56];[$収録番号.$A$1:$収録番号.$B$9];2;0)" office:value-type="float" office:value="15" calcext:value-type="float">
            <text:p>15</text:p>
          </table:table-cell>
          <table:table-cell office:value-type="string" calcext:value-type="string">
            <text:p>N</text:p>
          </table:table-cell>
          <table:table-cell table:formula="of:=VLOOKUP([.I56];[$レアリティ番号.$A$1:$レアリティ番号.$B$4];2;0)" office:value-type="float" office:value="1" calcext:value-type="float">
            <text:p>1</text:p>
          </table:table-cell>
          <table:table-cell office:value-type="string" calcext:value-type="string">
            <text:p>イジン</text:p>
          </table:table-cell>
          <table:table-cell table:formula="of:=VLOOKUP([.K56];[$種類番号.$A$1:$種類番号.$B$4];2;0)" office:value-type="float" office:value="1" calcext:value-type="float">
            <text:p>1</text:p>
          </table:table-cell>
          <table:table-cell office:value-type="string" calcext:value-type="string">
            <text:p>赤</text:p>
          </table:table-cell>
          <table:table-cell table:formula="of:=VLOOKUP([.M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IF(ISNA([.$S56]);&quot;null&quot;;&quot;&quot;&quot;&quot;&amp;[.$S56]&amp;&quot;&quot;&quot;&quot;);[$JSON.$E$1];[.$U56];[$JSON.$F$1];IF(ISNA([.$W56]);&quot;null&quot;;&quot;&quot;&quot;&quot;&amp;[.$W56]&amp;&quot;&quot;&quot;&quot;);[$JSON.$G$1];[.$Y56];[$JSON.$H$1];[.$H56];[$JSON.$I$1];[.J56];[$JSON.$J$1];[.$L56];[$JSON.$K$1];[.$O56];[$JSON.$L$1];[.$N56];[$JSON.$M$1];[.$R56];[$JSON.$N$1];[.$T56];[$JSON.$O$1];IF(ISNA([.$V56]);&quot;null&quot;;[.$V56]);[$JSON.$P$1];[.$X56];[$JSON.$Q$1];[.$A56];[$JSON.$R$1];[.$B56];[$JSON.$S$1])" office:value-type="string" office:string-value="{&quot;id&quot;:&quot;1-16&quot;,&quot;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orderTable&quot;:55,&quot;orderDeck&quot;:110}," calcext:value-type="string">
            <text:p>{"id":"1-16","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G57];[$収録番号.$A$1:$収録番号.$B$9];2;0)" office:value-type="float" office:value="15" calcext:value-type="float">
            <text:p>15</text:p>
          </table:table-cell>
          <table:table-cell office:value-type="string" calcext:value-type="string">
            <text:p>N</text:p>
          </table:table-cell>
          <table:table-cell table:formula="of:=VLOOKUP([.I57];[$レアリティ番号.$A$1:$レアリティ番号.$B$4];2;0)" office:value-type="float" office:value="1" calcext:value-type="float">
            <text:p>1</text:p>
          </table:table-cell>
          <table:table-cell office:value-type="string" calcext:value-type="string">
            <text:p>イジン</text:p>
          </table:table-cell>
          <table:table-cell table:formula="of:=VLOOKUP([.K57];[$種類番号.$A$1:$種類番号.$B$4];2;0)" office:value-type="float" office:value="1" calcext:value-type="float">
            <text:p>1</text:p>
          </table:table-cell>
          <table:table-cell office:value-type="string" calcext:value-type="string">
            <text:p>赤</text:p>
          </table:table-cell>
          <table:table-cell table:formula="of:=VLOOKUP([.M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IF(ISNA([.$S57]);&quot;null&quot;;&quot;&quot;&quot;&quot;&amp;[.$S57]&amp;&quot;&quot;&quot;&quot;);[$JSON.$E$1];[.$U57];[$JSON.$F$1];IF(ISNA([.$W57]);&quot;null&quot;;&quot;&quot;&quot;&quot;&amp;[.$W57]&amp;&quot;&quot;&quot;&quot;);[$JSON.$G$1];[.$Y57];[$JSON.$H$1];[.$H57];[$JSON.$I$1];[.J57];[$JSON.$J$1];[.$L57];[$JSON.$K$1];[.$O57];[$JSON.$L$1];[.$N57];[$JSON.$M$1];[.$R57];[$JSON.$N$1];[.$T57];[$JSON.$O$1];IF(ISNA([.$V57]);&quot;null&quot;;[.$V57]);[$JSON.$P$1];[.$X57];[$JSON.$Q$1];[.$A57];[$JSON.$R$1];[.$B57];[$JSON.$S$1])" office:value-type="string" office:string-value="{&quot;id&quot;:&quot;1-17&quot;,&quot;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orderTable&quot;:56,&quot;orderDeck&quot;:146}," calcext:value-type="string">
            <text:p>{"id":"1-17","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G58];[$収録番号.$A$1:$収録番号.$B$9];2;0)" office:value-type="float" office:value="15" calcext:value-type="float">
            <text:p>15</text:p>
          </table:table-cell>
          <table:table-cell office:value-type="string" calcext:value-type="string">
            <text:p>N</text:p>
          </table:table-cell>
          <table:table-cell table:formula="of:=VLOOKUP([.I58];[$レアリティ番号.$A$1:$レアリティ番号.$B$4];2;0)" office:value-type="float" office:value="1" calcext:value-type="float">
            <text:p>1</text:p>
          </table:table-cell>
          <table:table-cell office:value-type="string" calcext:value-type="string">
            <text:p>イジン</text:p>
          </table:table-cell>
          <table:table-cell table:formula="of:=VLOOKUP([.K58];[$種類番号.$A$1:$種類番号.$B$4];2;0)" office:value-type="float" office:value="1" calcext:value-type="float">
            <text:p>1</text:p>
          </table:table-cell>
          <table:table-cell office:value-type="string" calcext:value-type="string">
            <text:p>赤</text:p>
          </table:table-cell>
          <table:table-cell table:formula="of:=VLOOKUP([.M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IF(ISNA([.$S58]);&quot;null&quot;;&quot;&quot;&quot;&quot;&amp;[.$S58]&amp;&quot;&quot;&quot;&quot;);[$JSON.$E$1];[.$U58];[$JSON.$F$1];IF(ISNA([.$W58]);&quot;null&quot;;&quot;&quot;&quot;&quot;&amp;[.$W58]&amp;&quot;&quot;&quot;&quot;);[$JSON.$G$1];[.$Y58];[$JSON.$H$1];[.$H58];[$JSON.$I$1];[.J58];[$JSON.$J$1];[.$L58];[$JSON.$K$1];[.$O58];[$JSON.$L$1];[.$N58];[$JSON.$M$1];[.$R58];[$JSON.$N$1];[.$T58];[$JSON.$O$1];IF(ISNA([.$V58]);&quot;null&quot;;[.$V58]);[$JSON.$P$1];[.$X58];[$JSON.$Q$1];[.$A58];[$JSON.$R$1];[.$B58];[$JSON.$S$1])" office:value-type="string" office:string-value="{&quot;id&quot;:&quot;1-18&quot;,&quot;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orderTable&quot;:57,&quot;orderDeck&quot;:147}," calcext:value-type="string">
            <text:p>{"id":"1-18","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G59];[$収録番号.$A$1:$収録番号.$B$9];2;0)" office:value-type="float" office:value="15" calcext:value-type="float">
            <text:p>15</text:p>
          </table:table-cell>
          <table:table-cell office:value-type="string" calcext:value-type="string">
            <text:p>R</text:p>
          </table:table-cell>
          <table:table-cell table:formula="of:=VLOOKUP([.I59];[$レアリティ番号.$A$1:$レアリティ番号.$B$4];2;0)" office:value-type="float" office:value="2" calcext:value-type="float">
            <text:p>2</text:p>
          </table:table-cell>
          <table:table-cell office:value-type="string" calcext:value-type="string">
            <text:p>イジン</text:p>
          </table:table-cell>
          <table:table-cell table:formula="of:=VLOOKUP([.K59];[$種類番号.$A$1:$種類番号.$B$4];2;0)" office:value-type="float" office:value="1" calcext:value-type="float">
            <text:p>1</text:p>
          </table:table-cell>
          <table:table-cell office:value-type="string" calcext:value-type="string">
            <text:p>赤</text:p>
          </table:table-cell>
          <table:table-cell table:formula="of:=VLOOKUP([.M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office:value-type="float" office:value="6000" calcext:value-type="float">
            <text:p>6000</text:p>
          </table:table-cell>
          <table:table-cell table:style-name="ce8" table:formula="of:=NA()" office:value-type="string" office:string-value="" calcext:value-type="error">
            <text:p>#N/A</text:p>
          </table:table-cell>
          <table:table-cell table:formula="of:=IFERROR(VLOOKUP([.$W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IF(ISNA([.$S59]);&quot;null&quot;;&quot;&quot;&quot;&quot;&amp;[.$S59]&amp;&quot;&quot;&quot;&quot;);[$JSON.$E$1];[.$U59];[$JSON.$F$1];IF(ISNA([.$W59]);&quot;null&quot;;&quot;&quot;&quot;&quot;&amp;[.$W59]&amp;&quot;&quot;&quot;&quot;);[$JSON.$G$1];[.$Y59];[$JSON.$H$1];[.$H59];[$JSON.$I$1];[.J59];[$JSON.$J$1];[.$L59];[$JSON.$K$1];[.$O59];[$JSON.$L$1];[.$N59];[$JSON.$M$1];[.$R59];[$JSON.$N$1];[.$T59];[$JSON.$O$1];IF(ISNA([.$V59]);&quot;null&quot;;[.$V59]);[$JSON.$P$1];[.$X59];[$JSON.$Q$1];[.$A59];[$JSON.$R$1];[.$B59];[$JSON.$S$1])" office:value-type="string" office:string-value="{&quot;id&quot;:&quot;1-19&quot;,&quot;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orderTable&quot;:58,&quot;orderDeck&quot;:203}," calcext:value-type="string">
            <text:p>{"id":"1-19","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G60];[$収録番号.$A$1:$収録番号.$B$9];2;0)" office:value-type="float" office:value="15" calcext:value-type="float">
            <text:p>15</text:p>
          </table:table-cell>
          <table:table-cell office:value-type="string" calcext:value-type="string">
            <text:p>N</text:p>
          </table:table-cell>
          <table:table-cell table:formula="of:=VLOOKUP([.I60];[$レアリティ番号.$A$1:$レアリティ番号.$B$4];2;0)" office:value-type="float" office:value="1" calcext:value-type="float">
            <text:p>1</text:p>
          </table:table-cell>
          <table:table-cell office:value-type="string" calcext:value-type="string">
            <text:p>イジン</text:p>
          </table:table-cell>
          <table:table-cell table:formula="of:=VLOOKUP([.K60];[$種類番号.$A$1:$種類番号.$B$4];2;0)" office:value-type="float" office:value="1" calcext:value-type="float">
            <text:p>1</text:p>
          </table:table-cell>
          <table:table-cell office:value-type="string" calcext:value-type="string">
            <text:p>青</text:p>
          </table:table-cell>
          <table:table-cell table:formula="of:=VLOOKUP([.M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IF(ISNA([.$S60]);&quot;null&quot;;&quot;&quot;&quot;&quot;&amp;[.$S60]&amp;&quot;&quot;&quot;&quot;);[$JSON.$E$1];[.$U60];[$JSON.$F$1];IF(ISNA([.$W60]);&quot;null&quot;;&quot;&quot;&quot;&quot;&amp;[.$W60]&amp;&quot;&quot;&quot;&quot;);[$JSON.$G$1];[.$Y60];[$JSON.$H$1];[.$H60];[$JSON.$I$1];[.J60];[$JSON.$J$1];[.$L60];[$JSON.$K$1];[.$O60];[$JSON.$L$1];[.$N60];[$JSON.$M$1];[.$R60];[$JSON.$N$1];[.$T60];[$JSON.$O$1];IF(ISNA([.$V60]);&quot;null&quot;;[.$V60]);[$JSON.$P$1];[.$X60];[$JSON.$Q$1];[.$A60];[$JSON.$R$1];[.$B60];[$JSON.$S$1])" office:value-type="string" office:string-value="{&quot;id&quot;:&quot;1-20&quot;,&quot;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orderTable&quot;:59,&quot;orderDeck&quot;:7}," calcext:value-type="string">
            <text:p>{"id":"1-20","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G61];[$収録番号.$A$1:$収録番号.$B$9];2;0)" office:value-type="float" office:value="15" calcext:value-type="float">
            <text:p>15</text:p>
          </table:table-cell>
          <table:table-cell office:value-type="string" calcext:value-type="string">
            <text:p>N</text:p>
          </table:table-cell>
          <table:table-cell table:formula="of:=VLOOKUP([.I61];[$レアリティ番号.$A$1:$レアリティ番号.$B$4];2;0)" office:value-type="float" office:value="1" calcext:value-type="float">
            <text:p>1</text:p>
          </table:table-cell>
          <table:table-cell office:value-type="string" calcext:value-type="string">
            <text:p>イジン</text:p>
          </table:table-cell>
          <table:table-cell table:formula="of:=VLOOKUP([.K61];[$種類番号.$A$1:$種類番号.$B$4];2;0)" office:value-type="float" office:value="1" calcext:value-type="float">
            <text:p>1</text:p>
          </table:table-cell>
          <table:table-cell office:value-type="string" calcext:value-type="string">
            <text:p>青</text:p>
          </table:table-cell>
          <table:table-cell table:formula="of:=VLOOKUP([.M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IF(ISNA([.$S61]);&quot;null&quot;;&quot;&quot;&quot;&quot;&amp;[.$S61]&amp;&quot;&quot;&quot;&quot;);[$JSON.$E$1];[.$U61];[$JSON.$F$1];IF(ISNA([.$W61]);&quot;null&quot;;&quot;&quot;&quot;&quot;&amp;[.$W61]&amp;&quot;&quot;&quot;&quot;);[$JSON.$G$1];[.$Y61];[$JSON.$H$1];[.$H61];[$JSON.$I$1];[.J61];[$JSON.$J$1];[.$L61];[$JSON.$K$1];[.$O61];[$JSON.$L$1];[.$N61];[$JSON.$M$1];[.$R61];[$JSON.$N$1];[.$T61];[$JSON.$O$1];IF(ISNA([.$V61]);&quot;null&quot;;[.$V61]);[$JSON.$P$1];[.$X61];[$JSON.$Q$1];[.$A61];[$JSON.$R$1];[.$B61];[$JSON.$S$1])" office:value-type="string" office:string-value="{&quot;id&quot;:&quot;1-21&quot;,&quot;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orderTable&quot;:60,&quot;orderDeck&quot;:34}," calcext:value-type="string">
            <text:p>{"id":"1-21","name":"鑑真","kana":"がんじん","traitText":null,"ruleText":"航海 - アタッカーになったとき、1ドローして、これを破壊する。","legacyText":"1ドローする","imageUrl":"https://one-draw.jp/ijinden/cardlist/001/card/01_021.png","expansion":15,"rarity":1,"type":1,"level":2,"color":2,"term":1,"trait":0,"power":200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G62];[$収録番号.$A$1:$収録番号.$B$9];2;0)" office:value-type="float" office:value="15" calcext:value-type="float">
            <text:p>15</text:p>
          </table:table-cell>
          <table:table-cell office:value-type="string" calcext:value-type="string">
            <text:p>N</text:p>
          </table:table-cell>
          <table:table-cell table:formula="of:=VLOOKUP([.I62];[$レアリティ番号.$A$1:$レアリティ番号.$B$4];2;0)" office:value-type="float" office:value="1" calcext:value-type="float">
            <text:p>1</text:p>
          </table:table-cell>
          <table:table-cell office:value-type="string" calcext:value-type="string">
            <text:p>イジン</text:p>
          </table:table-cell>
          <table:table-cell table:formula="of:=VLOOKUP([.K62];[$種類番号.$A$1:$種類番号.$B$4];2;0)" office:value-type="float" office:value="1" calcext:value-type="float">
            <text:p>1</text:p>
          </table:table-cell>
          <table:table-cell office:value-type="string" calcext:value-type="string">
            <text:p>青</text:p>
          </table:table-cell>
          <table:table-cell table:formula="of:=VLOOKUP([.M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office:value-type="float" office:value="3000" calcext:value-type="float">
            <text:p>3000</text:p>
          </table:table-cell>
          <table:table-cell table:style-name="ce8" office:value-type="string" calcext:value-type="string">
            <text:p>魔力化</text:p>
          </table:table-cell>
          <table:table-cell table:formula="of:=IFERROR(VLOOKUP([.$W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IF(ISNA([.$S62]);&quot;null&quot;;&quot;&quot;&quot;&quot;&amp;[.$S62]&amp;&quot;&quot;&quot;&quot;);[$JSON.$E$1];[.$U62];[$JSON.$F$1];IF(ISNA([.$W62]);&quot;null&quot;;&quot;&quot;&quot;&quot;&amp;[.$W62]&amp;&quot;&quot;&quot;&quot;);[$JSON.$G$1];[.$Y62];[$JSON.$H$1];[.$H62];[$JSON.$I$1];[.J62];[$JSON.$J$1];[.$L62];[$JSON.$K$1];[.$O62];[$JSON.$L$1];[.$N62];[$JSON.$M$1];[.$R62];[$JSON.$N$1];[.$T62];[$JSON.$O$1];IF(ISNA([.$V62]);&quot;null&quot;;[.$V62]);[$JSON.$P$1];[.$X62];[$JSON.$Q$1];[.$A62];[$JSON.$R$1];[.$B62];[$JSON.$S$1])" office:value-type="string" office:string-value="{&quot;id&quot;:&quot;1-22&quot;,&quot;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orderTable&quot;:61,&quot;orderDeck&quot;:35}," calcext:value-type="string">
            <text:p>{"id":"1-22","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G63];[$収録番号.$A$1:$収録番号.$B$9];2;0)" office:value-type="float" office:value="15" calcext:value-type="float">
            <text:p>15</text:p>
          </table:table-cell>
          <table:table-cell office:value-type="string" calcext:value-type="string">
            <text:p>N</text:p>
          </table:table-cell>
          <table:table-cell table:formula="of:=VLOOKUP([.I63];[$レアリティ番号.$A$1:$レアリティ番号.$B$4];2;0)" office:value-type="float" office:value="1" calcext:value-type="float">
            <text:p>1</text:p>
          </table:table-cell>
          <table:table-cell office:value-type="string" calcext:value-type="string">
            <text:p>イジン</text:p>
          </table:table-cell>
          <table:table-cell table:formula="of:=VLOOKUP([.K63];[$種類番号.$A$1:$種類番号.$B$4];2;0)" office:value-type="float" office:value="1" calcext:value-type="float">
            <text:p>1</text:p>
          </table:table-cell>
          <table:table-cell office:value-type="string" calcext:value-type="string">
            <text:p>青</text:p>
          </table:table-cell>
          <table:table-cell table:formula="of:=VLOOKUP([.M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3];[$能力語番号.$A$1:$能力語番号.$B$10];2;0);0)" office:value-type="float" office:value="0" calcext:value-type="float">
            <text:p>0</text:p>
          </table:table-cell>
          <table:table-cell office:value-type="string" calcext:value-type="string">
            <text:p>美術</text:p>
          </table:table-cell>
          <table:table-cell table:formula="of:=IFERROR(VLOOKUP([.$S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IF(ISNA([.$S63]);&quot;null&quot;;&quot;&quot;&quot;&quot;&amp;[.$S63]&amp;&quot;&quot;&quot;&quot;);[$JSON.$E$1];[.$U63];[$JSON.$F$1];IF(ISNA([.$W63]);&quot;null&quot;;&quot;&quot;&quot;&quot;&amp;[.$W63]&amp;&quot;&quot;&quot;&quot;);[$JSON.$G$1];[.$Y63];[$JSON.$H$1];[.$H63];[$JSON.$I$1];[.J63];[$JSON.$J$1];[.$L63];[$JSON.$K$1];[.$O63];[$JSON.$L$1];[.$N63];[$JSON.$M$1];[.$R63];[$JSON.$N$1];[.$T63];[$JSON.$O$1];IF(ISNA([.$V63]);&quot;null&quot;;[.$V63]);[$JSON.$P$1];[.$X63];[$JSON.$Q$1];[.$A63];[$JSON.$R$1];[.$B63];[$JSON.$S$1])" office:value-type="string" office:string-value="{&quot;id&quot;:&quot;1-23&quot;,&quot;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orderTable&quot;:62,&quot;orderDeck&quot;:36}," calcext:value-type="string">
            <text:p>{"id":"1-23","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G64];[$収録番号.$A$1:$収録番号.$B$9];2;0)" office:value-type="float" office:value="15" calcext:value-type="float">
            <text:p>15</text:p>
          </table:table-cell>
          <table:table-cell office:value-type="string" calcext:value-type="string">
            <text:p>R</text:p>
          </table:table-cell>
          <table:table-cell table:formula="of:=VLOOKUP([.I64];[$レアリティ番号.$A$1:$レアリティ番号.$B$4];2;0)" office:value-type="float" office:value="2" calcext:value-type="float">
            <text:p>2</text:p>
          </table:table-cell>
          <table:table-cell office:value-type="string" calcext:value-type="string">
            <text:p>イジン</text:p>
          </table:table-cell>
          <table:table-cell table:formula="of:=VLOOKUP([.K64];[$種類番号.$A$1:$種類番号.$B$4];2;0)" office:value-type="float" office:value="1" calcext:value-type="float">
            <text:p>1</text:p>
          </table:table-cell>
          <table:table-cell office:value-type="string" calcext:value-type="string">
            <text:p>青</text:p>
          </table:table-cell>
          <table:table-cell table:formula="of:=VLOOKUP([.M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IF(ISNA([.$S64]);&quot;null&quot;;&quot;&quot;&quot;&quot;&amp;[.$S64]&amp;&quot;&quot;&quot;&quot;);[$JSON.$E$1];[.$U64];[$JSON.$F$1];IF(ISNA([.$W64]);&quot;null&quot;;&quot;&quot;&quot;&quot;&amp;[.$W64]&amp;&quot;&quot;&quot;&quot;);[$JSON.$G$1];[.$Y64];[$JSON.$H$1];[.$H64];[$JSON.$I$1];[.J64];[$JSON.$J$1];[.$L64];[$JSON.$K$1];[.$O64];[$JSON.$L$1];[.$N64];[$JSON.$M$1];[.$R64];[$JSON.$N$1];[.$T64];[$JSON.$O$1];IF(ISNA([.$V64]);&quot;null&quot;;[.$V64]);[$JSON.$P$1];[.$X64];[$JSON.$Q$1];[.$A64];[$JSON.$R$1];[.$B64];[$JSON.$S$1])" office:value-type="string" office:string-value="{&quot;id&quot;:&quot;1-24&quot;,&quot;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orderTable&quot;:63,&quot;orderDeck&quot;:78}," calcext:value-type="string">
            <text:p>{"id":"1-24","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G65];[$収録番号.$A$1:$収録番号.$B$9];2;0)" office:value-type="float" office:value="15" calcext:value-type="float">
            <text:p>15</text:p>
          </table:table-cell>
          <table:table-cell office:value-type="string" calcext:value-type="string">
            <text:p>N</text:p>
          </table:table-cell>
          <table:table-cell table:formula="of:=VLOOKUP([.I65];[$レアリティ番号.$A$1:$レアリティ番号.$B$4];2;0)" office:value-type="float" office:value="1" calcext:value-type="float">
            <text:p>1</text:p>
          </table:table-cell>
          <table:table-cell office:value-type="string" calcext:value-type="string">
            <text:p>イジン</text:p>
          </table:table-cell>
          <table:table-cell table:formula="of:=VLOOKUP([.K65];[$種類番号.$A$1:$種類番号.$B$4];2;0)" office:value-type="float" office:value="1" calcext:value-type="float">
            <text:p>1</text:p>
          </table:table-cell>
          <table:table-cell office:value-type="string" calcext:value-type="string">
            <text:p>青</text:p>
          </table:table-cell>
          <table:table-cell table:formula="of:=VLOOKUP([.M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IF(ISNA([.$S65]);&quot;null&quot;;&quot;&quot;&quot;&quot;&amp;[.$S65]&amp;&quot;&quot;&quot;&quot;);[$JSON.$E$1];[.$U65];[$JSON.$F$1];IF(ISNA([.$W65]);&quot;null&quot;;&quot;&quot;&quot;&quot;&amp;[.$W65]&amp;&quot;&quot;&quot;&quot;);[$JSON.$G$1];[.$Y65];[$JSON.$H$1];[.$H65];[$JSON.$I$1];[.J65];[$JSON.$J$1];[.$L65];[$JSON.$K$1];[.$O65];[$JSON.$L$1];[.$N65];[$JSON.$M$1];[.$R65];[$JSON.$N$1];[.$T65];[$JSON.$O$1];IF(ISNA([.$V65]);&quot;null&quot;;[.$V65]);[$JSON.$P$1];[.$X65];[$JSON.$Q$1];[.$A65];[$JSON.$R$1];[.$B65];[$JSON.$S$1])" office:value-type="string" office:string-value="{&quot;id&quot;:&quot;1-25&quot;,&quot;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orderTable&quot;:64,&quot;orderDeck&quot;:155}," calcext:value-type="string">
            <text:p>{"id":"1-25","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G66];[$収録番号.$A$1:$収録番号.$B$9];2;0)" office:value-type="float" office:value="15" calcext:value-type="float">
            <text:p>15</text:p>
          </table:table-cell>
          <table:table-cell office:value-type="string" calcext:value-type="string">
            <text:p>N</text:p>
          </table:table-cell>
          <table:table-cell table:formula="of:=VLOOKUP([.I66];[$レアリティ番号.$A$1:$レアリティ番号.$B$4];2;0)" office:value-type="float" office:value="1" calcext:value-type="float">
            <text:p>1</text:p>
          </table:table-cell>
          <table:table-cell office:value-type="string" calcext:value-type="string">
            <text:p>イジン</text:p>
          </table:table-cell>
          <table:table-cell table:formula="of:=VLOOKUP([.K66];[$種類番号.$A$1:$種類番号.$B$4];2;0)" office:value-type="float" office:value="1" calcext:value-type="float">
            <text:p>1</text:p>
          </table:table-cell>
          <table:table-cell office:value-type="string" calcext:value-type="string">
            <text:p>青</text:p>
          </table:table-cell>
          <table:table-cell table:formula="of:=VLOOKUP([.M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IF(ISNA([.$S66]);&quot;null&quot;;&quot;&quot;&quot;&quot;&amp;[.$S66]&amp;&quot;&quot;&quot;&quot;);[$JSON.$E$1];[.$U66];[$JSON.$F$1];IF(ISNA([.$W66]);&quot;null&quot;;&quot;&quot;&quot;&quot;&amp;[.$W66]&amp;&quot;&quot;&quot;&quot;);[$JSON.$G$1];[.$Y66];[$JSON.$H$1];[.$H66];[$JSON.$I$1];[.J66];[$JSON.$J$1];[.$L66];[$JSON.$K$1];[.$O66];[$JSON.$L$1];[.$N66];[$JSON.$M$1];[.$R66];[$JSON.$N$1];[.$T66];[$JSON.$O$1];IF(ISNA([.$V66]);&quot;null&quot;;[.$V66]);[$JSON.$P$1];[.$X66];[$JSON.$Q$1];[.$A66];[$JSON.$R$1];[.$B66];[$JSON.$S$1])" office:value-type="string" office:string-value="{&quot;id&quot;:&quot;1-26&quot;,&quot;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orderTable&quot;:65,&quot;orderDeck&quot;:79}," calcext:value-type="string">
            <text:p>{"id":"1-26","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G67];[$収録番号.$A$1:$収録番号.$B$9];2;0)" office:value-type="float" office:value="15" calcext:value-type="float">
            <text:p>15</text:p>
          </table:table-cell>
          <table:table-cell office:value-type="string" calcext:value-type="string">
            <text:p>N</text:p>
          </table:table-cell>
          <table:table-cell table:formula="of:=VLOOKUP([.I67];[$レアリティ番号.$A$1:$レアリティ番号.$B$4];2;0)" office:value-type="float" office:value="1" calcext:value-type="float">
            <text:p>1</text:p>
          </table:table-cell>
          <table:table-cell office:value-type="string" calcext:value-type="string">
            <text:p>イジン</text:p>
          </table:table-cell>
          <table:table-cell table:formula="of:=VLOOKUP([.K67];[$種類番号.$A$1:$種類番号.$B$4];2;0)" office:value-type="float" office:value="1" calcext:value-type="float">
            <text:p>1</text:p>
          </table:table-cell>
          <table:table-cell office:value-type="string" calcext:value-type="string">
            <text:p>青</text:p>
          </table:table-cell>
          <table:table-cell table:formula="of:=VLOOKUP([.M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IF(ISNA([.$S67]);&quot;null&quot;;&quot;&quot;&quot;&quot;&amp;[.$S67]&amp;&quot;&quot;&quot;&quot;);[$JSON.$E$1];[.$U67];[$JSON.$F$1];IF(ISNA([.$W67]);&quot;null&quot;;&quot;&quot;&quot;&quot;&amp;[.$W67]&amp;&quot;&quot;&quot;&quot;);[$JSON.$G$1];[.$Y67];[$JSON.$H$1];[.$H67];[$JSON.$I$1];[.J67];[$JSON.$J$1];[.$L67];[$JSON.$K$1];[.$O67];[$JSON.$L$1];[.$N67];[$JSON.$M$1];[.$R67];[$JSON.$N$1];[.$T67];[$JSON.$O$1];IF(ISNA([.$V67]);&quot;null&quot;;[.$V67]);[$JSON.$P$1];[.$X67];[$JSON.$Q$1];[.$A67];[$JSON.$R$1];[.$B67];[$JSON.$S$1])" office:value-type="string" office:string-value="{&quot;id&quot;:&quot;1-27&quot;,&quot;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orderTable&quot;:66,&quot;orderDeck&quot;:114}," calcext:value-type="string">
            <text:p>{"id":"1-27","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G68];[$収録番号.$A$1:$収録番号.$B$9];2;0)" office:value-type="float" office:value="15" calcext:value-type="float">
            <text:p>15</text:p>
          </table:table-cell>
          <table:table-cell office:value-type="string" calcext:value-type="string">
            <text:p>N</text:p>
          </table:table-cell>
          <table:table-cell table:formula="of:=VLOOKUP([.I68];[$レアリティ番号.$A$1:$レアリティ番号.$B$4];2;0)" office:value-type="float" office:value="1" calcext:value-type="float">
            <text:p>1</text:p>
          </table:table-cell>
          <table:table-cell office:value-type="string" calcext:value-type="string">
            <text:p>イジン</text:p>
          </table:table-cell>
          <table:table-cell table:formula="of:=VLOOKUP([.K68];[$種類番号.$A$1:$種類番号.$B$4];2;0)" office:value-type="float" office:value="1" calcext:value-type="float">
            <text:p>1</text:p>
          </table:table-cell>
          <table:table-cell office:value-type="string" calcext:value-type="string">
            <text:p>青</text:p>
          </table:table-cell>
          <table:table-cell table:formula="of:=VLOOKUP([.M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IF(ISNA([.$S68]);&quot;null&quot;;&quot;&quot;&quot;&quot;&amp;[.$S68]&amp;&quot;&quot;&quot;&quot;);[$JSON.$E$1];[.$U68];[$JSON.$F$1];IF(ISNA([.$W68]);&quot;null&quot;;&quot;&quot;&quot;&quot;&amp;[.$W68]&amp;&quot;&quot;&quot;&quot;);[$JSON.$G$1];[.$Y68];[$JSON.$H$1];[.$H68];[$JSON.$I$1];[.J68];[$JSON.$J$1];[.$L68];[$JSON.$K$1];[.$O68];[$JSON.$L$1];[.$N68];[$JSON.$M$1];[.$R68];[$JSON.$N$1];[.$T68];[$JSON.$O$1];IF(ISNA([.$V68]);&quot;null&quot;;[.$V68]);[$JSON.$P$1];[.$X68];[$JSON.$Q$1];[.$A68];[$JSON.$R$1];[.$B68];[$JSON.$S$1])" office:value-type="string" office:string-value="{&quot;id&quot;:&quot;1-28&quot;,&quot;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orderTable&quot;:67,&quot;orderDeck&quot;:115}," calcext:value-type="string">
            <text:p>{"id":"1-28","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G69];[$収録番号.$A$1:$収録番号.$B$9];2;0)" office:value-type="float" office:value="15" calcext:value-type="float">
            <text:p>15</text:p>
          </table:table-cell>
          <table:table-cell office:value-type="string" calcext:value-type="string">
            <text:p>R</text:p>
          </table:table-cell>
          <table:table-cell table:formula="of:=VLOOKUP([.I69];[$レアリティ番号.$A$1:$レアリティ番号.$B$4];2;0)" office:value-type="float" office:value="2" calcext:value-type="float">
            <text:p>2</text:p>
          </table:table-cell>
          <table:table-cell office:value-type="string" calcext:value-type="string">
            <text:p>イジン</text:p>
          </table:table-cell>
          <table:table-cell table:formula="of:=VLOOKUP([.K69];[$種類番号.$A$1:$種類番号.$B$4];2;0)" office:value-type="float" office:value="1" calcext:value-type="float">
            <text:p>1</text:p>
          </table:table-cell>
          <table:table-cell office:value-type="string" calcext:value-type="string">
            <text:p>青</text:p>
          </table:table-cell>
          <table:table-cell table:formula="of:=VLOOKUP([.M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IF(ISNA([.$S69]);&quot;null&quot;;&quot;&quot;&quot;&quot;&amp;[.$S69]&amp;&quot;&quot;&quot;&quot;);[$JSON.$E$1];[.$U69];[$JSON.$F$1];IF(ISNA([.$W69]);&quot;null&quot;;&quot;&quot;&quot;&quot;&amp;[.$W69]&amp;&quot;&quot;&quot;&quot;);[$JSON.$G$1];[.$Y69];[$JSON.$H$1];[.$H69];[$JSON.$I$1];[.J69];[$JSON.$J$1];[.$L69];[$JSON.$K$1];[.$O69];[$JSON.$L$1];[.$N69];[$JSON.$M$1];[.$R69];[$JSON.$N$1];[.$T69];[$JSON.$O$1];IF(ISNA([.$V69]);&quot;null&quot;;[.$V69]);[$JSON.$P$1];[.$X69];[$JSON.$Q$1];[.$A69];[$JSON.$R$1];[.$B69];[$JSON.$S$1])" office:value-type="string" office:string-value="{&quot;id&quot;:&quot;1-29&quot;,&quot;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orderTable&quot;:68,&quot;orderDeck&quot;:116}," calcext:value-type="string">
            <text:p>{"id":"1-29","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G70];[$収録番号.$A$1:$収録番号.$B$9];2;0)" office:value-type="float" office:value="15" calcext:value-type="float">
            <text:p>15</text:p>
          </table:table-cell>
          <table:table-cell office:value-type="string" calcext:value-type="string">
            <text:p>R</text:p>
          </table:table-cell>
          <table:table-cell table:formula="of:=VLOOKUP([.I70];[$レアリティ番号.$A$1:$レアリティ番号.$B$4];2;0)" office:value-type="float" office:value="2" calcext:value-type="float">
            <text:p>2</text:p>
          </table:table-cell>
          <table:table-cell office:value-type="string" calcext:value-type="string">
            <text:p>イジン</text:p>
          </table:table-cell>
          <table:table-cell table:formula="of:=VLOOKUP([.K70];[$種類番号.$A$1:$種類番号.$B$4];2;0)" office:value-type="float" office:value="1" calcext:value-type="float">
            <text:p>1</text:p>
          </table:table-cell>
          <table:table-cell office:value-type="string" calcext:value-type="string">
            <text:p>青</text:p>
          </table:table-cell>
          <table:table-cell table:formula="of:=VLOOKUP([.M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IF(ISNA([.$S70]);&quot;null&quot;;&quot;&quot;&quot;&quot;&amp;[.$S70]&amp;&quot;&quot;&quot;&quot;);[$JSON.$E$1];[.$U70];[$JSON.$F$1];IF(ISNA([.$W70]);&quot;null&quot;;&quot;&quot;&quot;&quot;&amp;[.$W70]&amp;&quot;&quot;&quot;&quot;);[$JSON.$G$1];[.$Y70];[$JSON.$H$1];[.$H70];[$JSON.$I$1];[.J70];[$JSON.$J$1];[.$L70];[$JSON.$K$1];[.$O70];[$JSON.$L$1];[.$N70];[$JSON.$M$1];[.$R70];[$JSON.$N$1];[.$T70];[$JSON.$O$1];IF(ISNA([.$V70]);&quot;null&quot;;[.$V70]);[$JSON.$P$1];[.$X70];[$JSON.$Q$1];[.$A70];[$JSON.$R$1];[.$B70];[$JSON.$S$1])" office:value-type="string" office:string-value="{&quot;id&quot;:&quot;1-30&quot;,&quot;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orderTable&quot;:69,&quot;orderDeck&quot;:156}," calcext:value-type="string">
            <text:p>{"id":"1-30","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G71];[$収録番号.$A$1:$収録番号.$B$9];2;0)" office:value-type="float" office:value="15" calcext:value-type="float">
            <text:p>15</text:p>
          </table:table-cell>
          <table:table-cell office:value-type="string" calcext:value-type="string">
            <text:p>N</text:p>
          </table:table-cell>
          <table:table-cell table:formula="of:=VLOOKUP([.I71];[$レアリティ番号.$A$1:$レアリティ番号.$B$4];2;0)" office:value-type="float" office:value="1" calcext:value-type="float">
            <text:p>1</text:p>
          </table:table-cell>
          <table:table-cell office:value-type="string" calcext:value-type="string">
            <text:p>イジン</text:p>
          </table:table-cell>
          <table:table-cell table:formula="of:=VLOOKUP([.K71];[$種類番号.$A$1:$種類番号.$B$4];2;0)" office:value-type="float" office:value="1" calcext:value-type="float">
            <text:p>1</text:p>
          </table:table-cell>
          <table:table-cell office:value-type="string" calcext:value-type="string">
            <text:p>青</text:p>
          </table:table-cell>
          <table:table-cell table:formula="of:=VLOOKUP([.M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1];[$能力語番号.$A$1:$能力語番号.$B$10];2;0);0)" office:value-type="float" office:value="0" calcext:value-type="float">
            <text:p>0</text:p>
          </table:table-cell>
          <table:table-cell office:value-type="string" calcext:value-type="string">
            <text:p>美術</text:p>
          </table:table-cell>
          <table:table-cell table:formula="of:=IFERROR(VLOOKUP([.$S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IF(ISNA([.$S71]);&quot;null&quot;;&quot;&quot;&quot;&quot;&amp;[.$S71]&amp;&quot;&quot;&quot;&quot;);[$JSON.$E$1];[.$U71];[$JSON.$F$1];IF(ISNA([.$W71]);&quot;null&quot;;&quot;&quot;&quot;&quot;&amp;[.$W71]&amp;&quot;&quot;&quot;&quot;);[$JSON.$G$1];[.$Y71];[$JSON.$H$1];[.$H71];[$JSON.$I$1];[.J71];[$JSON.$J$1];[.$L71];[$JSON.$K$1];[.$O71];[$JSON.$L$1];[.$N71];[$JSON.$M$1];[.$R71];[$JSON.$N$1];[.$T71];[$JSON.$O$1];IF(ISNA([.$V71]);&quot;null&quot;;[.$V71]);[$JSON.$P$1];[.$X71];[$JSON.$Q$1];[.$A71];[$JSON.$R$1];[.$B71];[$JSON.$S$1])" office:value-type="string" office:string-value="{&quot;id&quot;:&quot;1-31&quot;,&quot;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orderTable&quot;:70,&quot;orderDeck&quot;:157}," calcext:value-type="string">
            <text:p>{"id":"1-31","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G72];[$収録番号.$A$1:$収録番号.$B$9];2;0)" office:value-type="float" office:value="15" calcext:value-type="float">
            <text:p>15</text:p>
          </table:table-cell>
          <table:table-cell office:value-type="string" calcext:value-type="string">
            <text:p>N</text:p>
          </table:table-cell>
          <table:table-cell table:formula="of:=VLOOKUP([.I72];[$レアリティ番号.$A$1:$レアリティ番号.$B$4];2;0)" office:value-type="float" office:value="1" calcext:value-type="float">
            <text:p>1</text:p>
          </table:table-cell>
          <table:table-cell office:value-type="string" calcext:value-type="string">
            <text:p>イジン</text:p>
          </table:table-cell>
          <table:table-cell table:formula="of:=VLOOKUP([.K72];[$種類番号.$A$1:$種類番号.$B$4];2;0)" office:value-type="float" office:value="1" calcext:value-type="float">
            <text:p>1</text:p>
          </table:table-cell>
          <table:table-cell office:value-type="string" calcext:value-type="string">
            <text:p>青</text:p>
          </table:table-cell>
          <table:table-cell table:formula="of:=VLOOKUP([.M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office:value-type="float" office:value="4000" calcext:value-type="float">
            <text:p>4000</text:p>
          </table:table-cell>
          <table:table-cell table:style-name="ce8" office:value-type="string" calcext:value-type="string">
            <text:p>魔力化</text:p>
          </table:table-cell>
          <table:table-cell table:formula="of:=IFERROR(VLOOKUP([.$W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IF(ISNA([.$S72]);&quot;null&quot;;&quot;&quot;&quot;&quot;&amp;[.$S72]&amp;&quot;&quot;&quot;&quot;);[$JSON.$E$1];[.$U72];[$JSON.$F$1];IF(ISNA([.$W72]);&quot;null&quot;;&quot;&quot;&quot;&quot;&amp;[.$W72]&amp;&quot;&quot;&quot;&quot;);[$JSON.$G$1];[.$Y72];[$JSON.$H$1];[.$H72];[$JSON.$I$1];[.J72];[$JSON.$J$1];[.$L72];[$JSON.$K$1];[.$O72];[$JSON.$L$1];[.$N72];[$JSON.$M$1];[.$R72];[$JSON.$N$1];[.$T72];[$JSON.$O$1];IF(ISNA([.$V72]);&quot;null&quot;;[.$V72]);[$JSON.$P$1];[.$X72];[$JSON.$Q$1];[.$A72];[$JSON.$R$1];[.$B72];[$JSON.$S$1])" office:value-type="string" office:string-value="{&quot;id&quot;:&quot;1-32&quot;,&quot;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orderTable&quot;:71,&quot;orderDeck&quot;:188}," calcext:value-type="string">
            <text:p>{"id":"1-32","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G73];[$収録番号.$A$1:$収録番号.$B$9];2;0)" office:value-type="float" office:value="15" calcext:value-type="float">
            <text:p>15</text:p>
          </table:table-cell>
          <table:table-cell office:value-type="string" calcext:value-type="string">
            <text:p>R</text:p>
          </table:table-cell>
          <table:table-cell table:formula="of:=VLOOKUP([.I73];[$レアリティ番号.$A$1:$レアリティ番号.$B$4];2;0)" office:value-type="float" office:value="2" calcext:value-type="float">
            <text:p>2</text:p>
          </table:table-cell>
          <table:table-cell office:value-type="string" calcext:value-type="string">
            <text:p>イジン</text:p>
          </table:table-cell>
          <table:table-cell table:formula="of:=VLOOKUP([.K73];[$種類番号.$A$1:$種類番号.$B$4];2;0)" office:value-type="float" office:value="1" calcext:value-type="float">
            <text:p>1</text:p>
          </table:table-cell>
          <table:table-cell office:value-type="string" calcext:value-type="string">
            <text:p>緑</text:p>
          </table:table-cell>
          <table:table-cell table:formula="of:=VLOOKUP([.M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IF(ISNA([.$S73]);&quot;null&quot;;&quot;&quot;&quot;&quot;&amp;[.$S73]&amp;&quot;&quot;&quot;&quot;);[$JSON.$E$1];[.$U73];[$JSON.$F$1];IF(ISNA([.$W73]);&quot;null&quot;;&quot;&quot;&quot;&quot;&amp;[.$W73]&amp;&quot;&quot;&quot;&quot;);[$JSON.$G$1];[.$Y73];[$JSON.$H$1];[.$H73];[$JSON.$I$1];[.J73];[$JSON.$J$1];[.$L73];[$JSON.$K$1];[.$O73];[$JSON.$L$1];[.$N73];[$JSON.$M$1];[.$R73];[$JSON.$N$1];[.$T73];[$JSON.$O$1];IF(ISNA([.$V73]);&quot;null&quot;;[.$V73]);[$JSON.$P$1];[.$X73];[$JSON.$Q$1];[.$A73];[$JSON.$R$1];[.$B73];[$JSON.$S$1])" office:value-type="string" office:string-value="{&quot;id&quot;:&quot;1-33&quot;,&quot;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orderTable&quot;:72,&quot;orderDeck&quot;:13}," calcext:value-type="string">
            <text:p>{"id":"1-33","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G74];[$収録番号.$A$1:$収録番号.$B$9];2;0)" office:value-type="float" office:value="15" calcext:value-type="float">
            <text:p>15</text:p>
          </table:table-cell>
          <table:table-cell office:value-type="string" calcext:value-type="string">
            <text:p>N</text:p>
          </table:table-cell>
          <table:table-cell table:formula="of:=VLOOKUP([.I74];[$レアリティ番号.$A$1:$レアリティ番号.$B$4];2;0)" office:value-type="float" office:value="1" calcext:value-type="float">
            <text:p>1</text:p>
          </table:table-cell>
          <table:table-cell office:value-type="string" calcext:value-type="string">
            <text:p>イジン</text:p>
          </table:table-cell>
          <table:table-cell table:formula="of:=VLOOKUP([.K74];[$種類番号.$A$1:$種類番号.$B$4];2;0)" office:value-type="float" office:value="1" calcext:value-type="float">
            <text:p>1</text:p>
          </table:table-cell>
          <table:table-cell office:value-type="string" calcext:value-type="string">
            <text:p>緑</text:p>
          </table:table-cell>
          <table:table-cell table:formula="of:=VLOOKUP([.M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4];[$能力語番号.$A$1:$能力語番号.$B$10];2;0);0)" office:value-type="float" office:value="0" calcext:value-type="float">
            <text:p>0</text:p>
          </table:table-cell>
          <table:table-cell office:value-type="string" calcext:value-type="string">
            <text:p>美術</text:p>
          </table:table-cell>
          <table:table-cell table:formula="of:=IFERROR(VLOOKUP([.$S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IF(ISNA([.$S74]);&quot;null&quot;;&quot;&quot;&quot;&quot;&amp;[.$S74]&amp;&quot;&quot;&quot;&quot;);[$JSON.$E$1];[.$U74];[$JSON.$F$1];IF(ISNA([.$W74]);&quot;null&quot;;&quot;&quot;&quot;&quot;&amp;[.$W74]&amp;&quot;&quot;&quot;&quot;);[$JSON.$G$1];[.$Y74];[$JSON.$H$1];[.$H74];[$JSON.$I$1];[.J74];[$JSON.$J$1];[.$L74];[$JSON.$K$1];[.$O74];[$JSON.$L$1];[.$N74];[$JSON.$M$1];[.$R74];[$JSON.$N$1];[.$T74];[$JSON.$O$1];IF(ISNA([.$V74]);&quot;null&quot;;[.$V74]);[$JSON.$P$1];[.$X74];[$JSON.$Q$1];[.$A74];[$JSON.$R$1];[.$B74];[$JSON.$S$1])" office:value-type="string" office:string-value="{&quot;id&quot;:&quot;1-34&quot;,&quot;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orderTable&quot;:73,&quot;orderDeck&quot;:45}," calcext:value-type="string">
            <text:p>{"id":"1-34","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G75];[$収録番号.$A$1:$収録番号.$B$9];2;0)" office:value-type="float" office:value="15" calcext:value-type="float">
            <text:p>15</text:p>
          </table:table-cell>
          <table:table-cell office:value-type="string" calcext:value-type="string">
            <text:p>N</text:p>
          </table:table-cell>
          <table:table-cell table:formula="of:=VLOOKUP([.I75];[$レアリティ番号.$A$1:$レアリティ番号.$B$4];2;0)" office:value-type="float" office:value="1" calcext:value-type="float">
            <text:p>1</text:p>
          </table:table-cell>
          <table:table-cell office:value-type="string" calcext:value-type="string">
            <text:p>イジン</text:p>
          </table:table-cell>
          <table:table-cell table:formula="of:=VLOOKUP([.K75];[$種類番号.$A$1:$種類番号.$B$4];2;0)" office:value-type="float" office:value="1" calcext:value-type="float">
            <text:p>1</text:p>
          </table:table-cell>
          <table:table-cell office:value-type="string" calcext:value-type="string">
            <text:p>緑</text:p>
          </table:table-cell>
          <table:table-cell table:formula="of:=VLOOKUP([.M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office:value-type="float" office:value="2000" calcext:value-type="float">
            <text:p>2000</text:p>
          </table:table-cell>
          <table:table-cell table:style-name="ce8" office:value-type="string" calcext:value-type="string">
            <text:p>魔力化</text:p>
          </table:table-cell>
          <table:table-cell table:formula="of:=IFERROR(VLOOKUP([.$W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IF(ISNA([.$S75]);&quot;null&quot;;&quot;&quot;&quot;&quot;&amp;[.$S75]&amp;&quot;&quot;&quot;&quot;);[$JSON.$E$1];[.$U75];[$JSON.$F$1];IF(ISNA([.$W75]);&quot;null&quot;;&quot;&quot;&quot;&quot;&amp;[.$W75]&amp;&quot;&quot;&quot;&quot;);[$JSON.$G$1];[.$Y75];[$JSON.$H$1];[.$H75];[$JSON.$I$1];[.J75];[$JSON.$J$1];[.$L75];[$JSON.$K$1];[.$O75];[$JSON.$L$1];[.$N75];[$JSON.$M$1];[.$R75];[$JSON.$N$1];[.$T75];[$JSON.$O$1];IF(ISNA([.$V75]);&quot;null&quot;;[.$V75]);[$JSON.$P$1];[.$X75];[$JSON.$Q$1];[.$A75];[$JSON.$R$1];[.$B75];[$JSON.$S$1])" office:value-type="string" office:string-value="{&quot;id&quot;:&quot;1-35&quot;,&quot;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orderTable&quot;:74,&quot;orderDeck&quot;:86}," calcext:value-type="string">
            <text:p>{"id":"1-35","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G76];[$収録番号.$A$1:$収録番号.$B$9];2;0)" office:value-type="float" office:value="15" calcext:value-type="float">
            <text:p>15</text:p>
          </table:table-cell>
          <table:table-cell office:value-type="string" calcext:value-type="string">
            <text:p>N</text:p>
          </table:table-cell>
          <table:table-cell table:formula="of:=VLOOKUP([.I76];[$レアリティ番号.$A$1:$レアリティ番号.$B$4];2;0)" office:value-type="float" office:value="1" calcext:value-type="float">
            <text:p>1</text:p>
          </table:table-cell>
          <table:table-cell office:value-type="string" calcext:value-type="string">
            <text:p>イジン</text:p>
          </table:table-cell>
          <table:table-cell table:formula="of:=VLOOKUP([.K76];[$種類番号.$A$1:$種類番号.$B$4];2;0)" office:value-type="float" office:value="1" calcext:value-type="float">
            <text:p>1</text:p>
          </table:table-cell>
          <table:table-cell office:value-type="string" calcext:value-type="string">
            <text:p>緑</text:p>
          </table:table-cell>
          <table:table-cell table:formula="of:=VLOOKUP([.M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IF(ISNA([.$S76]);&quot;null&quot;;&quot;&quot;&quot;&quot;&amp;[.$S76]&amp;&quot;&quot;&quot;&quot;);[$JSON.$E$1];[.$U76];[$JSON.$F$1];IF(ISNA([.$W76]);&quot;null&quot;;&quot;&quot;&quot;&quot;&amp;[.$W76]&amp;&quot;&quot;&quot;&quot;);[$JSON.$G$1];[.$Y76];[$JSON.$H$1];[.$H76];[$JSON.$I$1];[.J76];[$JSON.$J$1];[.$L76];[$JSON.$K$1];[.$O76];[$JSON.$L$1];[.$N76];[$JSON.$M$1];[.$R76];[$JSON.$N$1];[.$T76];[$JSON.$O$1];IF(ISNA([.$V76]);&quot;null&quot;;[.$V76]);[$JSON.$P$1];[.$X76];[$JSON.$Q$1];[.$A76];[$JSON.$R$1];[.$B76];[$JSON.$S$1])" office:value-type="string" office:string-value="{&quot;id&quot;:&quot;1-36&quot;,&quot;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orderTable&quot;:75,&quot;orderDeck&quot;:87}," calcext:value-type="string">
            <text:p>{"id":"1-36","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G77];[$収録番号.$A$1:$収録番号.$B$9];2;0)" office:value-type="float" office:value="15" calcext:value-type="float">
            <text:p>15</text:p>
          </table:table-cell>
          <table:table-cell office:value-type="string" calcext:value-type="string">
            <text:p>N</text:p>
          </table:table-cell>
          <table:table-cell table:formula="of:=VLOOKUP([.I77];[$レアリティ番号.$A$1:$レアリティ番号.$B$4];2;0)" office:value-type="float" office:value="1" calcext:value-type="float">
            <text:p>1</text:p>
          </table:table-cell>
          <table:table-cell office:value-type="string" calcext:value-type="string">
            <text:p>イジン</text:p>
          </table:table-cell>
          <table:table-cell table:formula="of:=VLOOKUP([.K77];[$種類番号.$A$1:$種類番号.$B$4];2;0)" office:value-type="float" office:value="1" calcext:value-type="float">
            <text:p>1</text:p>
          </table:table-cell>
          <table:table-cell office:value-type="string" calcext:value-type="string">
            <text:p>緑</text:p>
          </table:table-cell>
          <table:table-cell table:formula="of:=VLOOKUP([.M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office:value-type="float" office:value="4000" calcext:value-type="float">
            <text:p>4000</text:p>
          </table:table-cell>
          <table:table-cell table:style-name="ce8" office:value-type="string" calcext:value-type="string">
            <text:p>魔力化</text:p>
          </table:table-cell>
          <table:table-cell table:formula="of:=IFERROR(VLOOKUP([.$W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IF(ISNA([.$S77]);&quot;null&quot;;&quot;&quot;&quot;&quot;&amp;[.$S77]&amp;&quot;&quot;&quot;&quot;);[$JSON.$E$1];[.$U77];[$JSON.$F$1];IF(ISNA([.$W77]);&quot;null&quot;;&quot;&quot;&quot;&quot;&amp;[.$W77]&amp;&quot;&quot;&quot;&quot;);[$JSON.$G$1];[.$Y77];[$JSON.$H$1];[.$H77];[$JSON.$I$1];[.J77];[$JSON.$J$1];[.$L77];[$JSON.$K$1];[.$O77];[$JSON.$L$1];[.$N77];[$JSON.$M$1];[.$R77];[$JSON.$N$1];[.$T77];[$JSON.$O$1];IF(ISNA([.$V77]);&quot;null&quot;;[.$V77]);[$JSON.$P$1];[.$X77];[$JSON.$Q$1];[.$A77];[$JSON.$R$1];[.$B77];[$JSON.$S$1])" office:value-type="string" office:string-value="{&quot;id&quot;:&quot;1-37&quot;,&quot;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orderTable&quot;:76,&quot;orderDeck&quot;:125}," calcext:value-type="string">
            <text:p>{"id":"1-37","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G78];[$収録番号.$A$1:$収録番号.$B$9];2;0)" office:value-type="float" office:value="15" calcext:value-type="float">
            <text:p>15</text:p>
          </table:table-cell>
          <table:table-cell office:value-type="string" calcext:value-type="string">
            <text:p>N</text:p>
          </table:table-cell>
          <table:table-cell table:formula="of:=VLOOKUP([.I78];[$レアリティ番号.$A$1:$レアリティ番号.$B$4];2;0)" office:value-type="float" office:value="1" calcext:value-type="float">
            <text:p>1</text:p>
          </table:table-cell>
          <table:table-cell office:value-type="string" calcext:value-type="string">
            <text:p>イジン</text:p>
          </table:table-cell>
          <table:table-cell table:formula="of:=VLOOKUP([.K78];[$種類番号.$A$1:$種類番号.$B$4];2;0)" office:value-type="float" office:value="1" calcext:value-type="float">
            <text:p>1</text:p>
          </table:table-cell>
          <table:table-cell office:value-type="string" calcext:value-type="string">
            <text:p>緑</text:p>
          </table:table-cell>
          <table:table-cell table:formula="of:=VLOOKUP([.M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Q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IF(ISNA([.$S78]);&quot;null&quot;;&quot;&quot;&quot;&quot;&amp;[.$S78]&amp;&quot;&quot;&quot;&quot;);[$JSON.$E$1];[.$U78];[$JSON.$F$1];IF(ISNA([.$W78]);&quot;null&quot;;&quot;&quot;&quot;&quot;&amp;[.$W78]&amp;&quot;&quot;&quot;&quot;);[$JSON.$G$1];[.$Y78];[$JSON.$H$1];[.$H78];[$JSON.$I$1];[.J78];[$JSON.$J$1];[.$L78];[$JSON.$K$1];[.$O78];[$JSON.$L$1];[.$N78];[$JSON.$M$1];[.$R78];[$JSON.$N$1];[.$T78];[$JSON.$O$1];IF(ISNA([.$V78]);&quot;null&quot;;[.$V78]);[$JSON.$P$1];[.$X78];[$JSON.$Q$1];[.$A78];[$JSON.$R$1];[.$B78];[$JSON.$S$1])" office:value-type="string" office:string-value="{&quot;id&quot;:&quot;1-38&quot;,&quot;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orderTable&quot;:77,&quot;orderDeck&quot;:126}," calcext:value-type="string">
            <text:p>{"id":"1-38","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G79];[$収録番号.$A$1:$収録番号.$B$9];2;0)" office:value-type="float" office:value="15" calcext:value-type="float">
            <text:p>15</text:p>
          </table:table-cell>
          <table:table-cell office:value-type="string" calcext:value-type="string">
            <text:p>N</text:p>
          </table:table-cell>
          <table:table-cell table:formula="of:=VLOOKUP([.I79];[$レアリティ番号.$A$1:$レアリティ番号.$B$4];2;0)" office:value-type="float" office:value="1" calcext:value-type="float">
            <text:p>1</text:p>
          </table:table-cell>
          <table:table-cell office:value-type="string" calcext:value-type="string">
            <text:p>イジン</text:p>
          </table:table-cell>
          <table:table-cell table:formula="of:=VLOOKUP([.K79];[$種類番号.$A$1:$種類番号.$B$4];2;0)" office:value-type="float" office:value="1" calcext:value-type="float">
            <text:p>1</text:p>
          </table:table-cell>
          <table:table-cell office:value-type="string" calcext:value-type="string">
            <text:p>緑</text:p>
          </table:table-cell>
          <table:table-cell table:formula="of:=VLOOKUP([.M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79];[$能力語番号.$A$1:$能力語番号.$B$10];2;0);0)" office:value-type="float" office:value="0" calcext:value-type="float">
            <text:p>0</text:p>
          </table:table-cell>
          <table:table-cell office:value-type="string" calcext:value-type="string">
            <text:p>音楽</text:p>
          </table:table-cell>
          <table:table-cell table:formula="of:=IFERROR(VLOOKUP([.$S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IF(ISNA([.$S79]);&quot;null&quot;;&quot;&quot;&quot;&quot;&amp;[.$S79]&amp;&quot;&quot;&quot;&quot;);[$JSON.$E$1];[.$U79];[$JSON.$F$1];IF(ISNA([.$W79]);&quot;null&quot;;&quot;&quot;&quot;&quot;&amp;[.$W79]&amp;&quot;&quot;&quot;&quot;);[$JSON.$G$1];[.$Y79];[$JSON.$H$1];[.$H79];[$JSON.$I$1];[.J79];[$JSON.$J$1];[.$L79];[$JSON.$K$1];[.$O79];[$JSON.$L$1];[.$N79];[$JSON.$M$1];[.$R79];[$JSON.$N$1];[.$T79];[$JSON.$O$1];IF(ISNA([.$V79]);&quot;null&quot;;[.$V79]);[$JSON.$P$1];[.$X79];[$JSON.$Q$1];[.$A79];[$JSON.$R$1];[.$B79];[$JSON.$S$1])" office:value-type="string" office:string-value="{&quot;id&quot;:&quot;1-39&quot;,&quot;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orderTable&quot;:78,&quot;orderDeck&quot;:127}," calcext:value-type="string">
            <text:p>{"id":"1-39","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G80];[$収録番号.$A$1:$収録番号.$B$9];2;0)" office:value-type="float" office:value="15" calcext:value-type="float">
            <text:p>15</text:p>
          </table:table-cell>
          <table:table-cell office:value-type="string" calcext:value-type="string">
            <text:p>R</text:p>
          </table:table-cell>
          <table:table-cell table:formula="of:=VLOOKUP([.I80];[$レアリティ番号.$A$1:$レアリティ番号.$B$4];2;0)" office:value-type="float" office:value="2" calcext:value-type="float">
            <text:p>2</text:p>
          </table:table-cell>
          <table:table-cell office:value-type="string" calcext:value-type="string">
            <text:p>イジン</text:p>
          </table:table-cell>
          <table:table-cell table:formula="of:=VLOOKUP([.K80];[$種類番号.$A$1:$種類番号.$B$4];2;0)" office:value-type="float" office:value="1" calcext:value-type="float">
            <text:p>1</text:p>
          </table:table-cell>
          <table:table-cell office:value-type="string" calcext:value-type="string">
            <text:p>緑</text:p>
          </table:table-cell>
          <table:table-cell table:formula="of:=VLOOKUP([.M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IF(ISNA([.$S80]);&quot;null&quot;;&quot;&quot;&quot;&quot;&amp;[.$S80]&amp;&quot;&quot;&quot;&quot;);[$JSON.$E$1];[.$U80];[$JSON.$F$1];IF(ISNA([.$W80]);&quot;null&quot;;&quot;&quot;&quot;&quot;&amp;[.$W80]&amp;&quot;&quot;&quot;&quot;);[$JSON.$G$1];[.$Y80];[$JSON.$H$1];[.$H80];[$JSON.$I$1];[.J80];[$JSON.$J$1];[.$L80];[$JSON.$K$1];[.$O80];[$JSON.$L$1];[.$N80];[$JSON.$M$1];[.$R80];[$JSON.$N$1];[.$T80];[$JSON.$O$1];IF(ISNA([.$V80]);&quot;null&quot;;[.$V80]);[$JSON.$P$1];[.$X80];[$JSON.$Q$1];[.$A80];[$JSON.$R$1];[.$B80];[$JSON.$S$1])" office:value-type="string" office:string-value="{&quot;id&quot;:&quot;1-40&quot;,&quot;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orderTable&quot;:79,&quot;orderDeck&quot;:164}," calcext:value-type="string">
            <text:p>{"id":"1-40","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G81];[$収録番号.$A$1:$収録番号.$B$9];2;0)" office:value-type="float" office:value="15" calcext:value-type="float">
            <text:p>15</text:p>
          </table:table-cell>
          <table:table-cell office:value-type="string" calcext:value-type="string">
            <text:p>N</text:p>
          </table:table-cell>
          <table:table-cell table:formula="of:=VLOOKUP([.I81];[$レアリティ番号.$A$1:$レアリティ番号.$B$4];2;0)" office:value-type="float" office:value="1" calcext:value-type="float">
            <text:p>1</text:p>
          </table:table-cell>
          <table:table-cell office:value-type="string" calcext:value-type="string">
            <text:p>イジン</text:p>
          </table:table-cell>
          <table:table-cell table:formula="of:=VLOOKUP([.K81];[$種類番号.$A$1:$種類番号.$B$4];2;0)" office:value-type="float" office:value="1" calcext:value-type="float">
            <text:p>1</text:p>
          </table:table-cell>
          <table:table-cell office:value-type="string" calcext:value-type="string">
            <text:p>緑</text:p>
          </table:table-cell>
          <table:table-cell table:formula="of:=VLOOKUP([.M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1];[$能力語番号.$A$1:$能力語番号.$B$10];2;0);0)" office:value-type="float" office:value="0" calcext:value-type="float">
            <text:p>0</text:p>
          </table:table-cell>
          <table:table-cell office:value-type="string" calcext:value-type="string">
            <text:p>音楽</text:p>
          </table:table-cell>
          <table:table-cell table:formula="of:=IFERROR(VLOOKUP([.$S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IF(ISNA([.$S81]);&quot;null&quot;;&quot;&quot;&quot;&quot;&amp;[.$S81]&amp;&quot;&quot;&quot;&quot;);[$JSON.$E$1];[.$U81];[$JSON.$F$1];IF(ISNA([.$W81]);&quot;null&quot;;&quot;&quot;&quot;&quot;&amp;[.$W81]&amp;&quot;&quot;&quot;&quot;);[$JSON.$G$1];[.$Y81];[$JSON.$H$1];[.$H81];[$JSON.$I$1];[.J81];[$JSON.$J$1];[.$L81];[$JSON.$K$1];[.$O81];[$JSON.$L$1];[.$N81];[$JSON.$M$1];[.$R81];[$JSON.$N$1];[.$T81];[$JSON.$O$1];IF(ISNA([.$V81]);&quot;null&quot;;[.$V81]);[$JSON.$P$1];[.$X81];[$JSON.$Q$1];[.$A81];[$JSON.$R$1];[.$B81];[$JSON.$S$1])" office:value-type="string" office:string-value="{&quot;id&quot;:&quot;1-41&quot;,&quot;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orderTable&quot;:80,&quot;orderDeck&quot;:165}," calcext:value-type="string">
            <text:p>{"id":"1-41","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G82];[$収録番号.$A$1:$収録番号.$B$9];2;0)" office:value-type="float" office:value="15" calcext:value-type="float">
            <text:p>15</text:p>
          </table:table-cell>
          <table:table-cell office:value-type="string" calcext:value-type="string">
            <text:p>N</text:p>
          </table:table-cell>
          <table:table-cell table:formula="of:=VLOOKUP([.I82];[$レアリティ番号.$A$1:$レアリティ番号.$B$4];2;0)" office:value-type="float" office:value="1" calcext:value-type="float">
            <text:p>1</text:p>
          </table:table-cell>
          <table:table-cell office:value-type="string" calcext:value-type="string">
            <text:p>イジン</text:p>
          </table:table-cell>
          <table:table-cell table:formula="of:=VLOOKUP([.K82];[$種類番号.$A$1:$種類番号.$B$4];2;0)" office:value-type="float" office:value="1" calcext:value-type="float">
            <text:p>1</text:p>
          </table:table-cell>
          <table:table-cell office:value-type="string" calcext:value-type="string">
            <text:p>緑</text:p>
          </table:table-cell>
          <table:table-cell table:formula="of:=VLOOKUP([.M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office:value-type="float" office:value="5000" calcext:value-type="float">
            <text:p>5000</text:p>
          </table:table-cell>
          <table:table-cell table:style-name="ce8" office:value-type="string" calcext:value-type="string">
            <text:p>魔力化</text:p>
          </table:table-cell>
          <table:table-cell table:formula="of:=IFERROR(VLOOKUP([.$W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IF(ISNA([.$S82]);&quot;null&quot;;&quot;&quot;&quot;&quot;&amp;[.$S82]&amp;&quot;&quot;&quot;&quot;);[$JSON.$E$1];[.$U82];[$JSON.$F$1];IF(ISNA([.$W82]);&quot;null&quot;;&quot;&quot;&quot;&quot;&amp;[.$W82]&amp;&quot;&quot;&quot;&quot;);[$JSON.$G$1];[.$Y82];[$JSON.$H$1];[.$H82];[$JSON.$I$1];[.J82];[$JSON.$J$1];[.$L82];[$JSON.$K$1];[.$O82];[$JSON.$L$1];[.$N82];[$JSON.$M$1];[.$R82];[$JSON.$N$1];[.$T82];[$JSON.$O$1];IF(ISNA([.$V82]);&quot;null&quot;;[.$V82]);[$JSON.$P$1];[.$X82];[$JSON.$Q$1];[.$A82];[$JSON.$R$1];[.$B82];[$JSON.$S$1])" office:value-type="string" office:string-value="{&quot;id&quot;:&quot;1-42&quot;,&quot;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orderTable&quot;:81,&quot;orderDeck&quot;:190}," calcext:value-type="string">
            <text:p>{"id":"1-42","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G83];[$収録番号.$A$1:$収録番号.$B$9];2;0)" office:value-type="float" office:value="15" calcext:value-type="float">
            <text:p>15</text:p>
          </table:table-cell>
          <table:table-cell office:value-type="string" calcext:value-type="string">
            <text:p>N</text:p>
          </table:table-cell>
          <table:table-cell table:formula="of:=VLOOKUP([.I83];[$レアリティ番号.$A$1:$レアリティ番号.$B$4];2;0)" office:value-type="float" office:value="1" calcext:value-type="float">
            <text:p>1</text:p>
          </table:table-cell>
          <table:table-cell office:value-type="string" calcext:value-type="string">
            <text:p>イジン</text:p>
          </table:table-cell>
          <table:table-cell table:formula="of:=VLOOKUP([.K83];[$種類番号.$A$1:$種類番号.$B$4];2;0)" office:value-type="float" office:value="1" calcext:value-type="float">
            <text:p>1</text:p>
          </table:table-cell>
          <table:table-cell office:value-type="string" calcext:value-type="string">
            <text:p>緑</text:p>
          </table:table-cell>
          <table:table-cell table:formula="of:=VLOOKUP([.M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IF(ISNA([.$S83]);&quot;null&quot;;&quot;&quot;&quot;&quot;&amp;[.$S83]&amp;&quot;&quot;&quot;&quot;);[$JSON.$E$1];[.$U83];[$JSON.$F$1];IF(ISNA([.$W83]);&quot;null&quot;;&quot;&quot;&quot;&quot;&amp;[.$W83]&amp;&quot;&quot;&quot;&quot;);[$JSON.$G$1];[.$Y83];[$JSON.$H$1];[.$H83];[$JSON.$I$1];[.J83];[$JSON.$J$1];[.$L83];[$JSON.$K$1];[.$O83];[$JSON.$L$1];[.$N83];[$JSON.$M$1];[.$R83];[$JSON.$N$1];[.$T83];[$JSON.$O$1];IF(ISNA([.$V83]);&quot;null&quot;;[.$V83]);[$JSON.$P$1];[.$X83];[$JSON.$Q$1];[.$A83];[$JSON.$R$1];[.$B83];[$JSON.$S$1])" office:value-type="string" office:string-value="{&quot;id&quot;:&quot;1-43&quot;,&quot;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orderTable&quot;:82,&quot;orderDeck&quot;:191}," calcext:value-type="string">
            <text:p>{"id":"1-43","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G84];[$収録番号.$A$1:$収録番号.$B$9];2;0)" office:value-type="float" office:value="15" calcext:value-type="float">
            <text:p>15</text:p>
          </table:table-cell>
          <table:table-cell office:value-type="string" calcext:value-type="string">
            <text:p>N</text:p>
          </table:table-cell>
          <table:table-cell table:formula="of:=VLOOKUP([.I84];[$レアリティ番号.$A$1:$レアリティ番号.$B$4];2;0)" office:value-type="float" office:value="1" calcext:value-type="float">
            <text:p>1</text:p>
          </table:table-cell>
          <table:table-cell office:value-type="string" calcext:value-type="string">
            <text:p>イジン</text:p>
          </table:table-cell>
          <table:table-cell table:formula="of:=VLOOKUP([.K84];[$種類番号.$A$1:$種類番号.$B$4];2;0)" office:value-type="float" office:value="1" calcext:value-type="float">
            <text:p>1</text:p>
          </table:table-cell>
          <table:table-cell office:value-type="string" calcext:value-type="string">
            <text:p>緑</text:p>
          </table:table-cell>
          <table:table-cell table:formula="of:=VLOOKUP([.M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4];[$能力語番号.$A$1:$能力語番号.$B$10];2;0);0)" office:value-type="float" office:value="0" calcext:value-type="float">
            <text:p>0</text:p>
          </table:table-cell>
          <table:table-cell office:value-type="string" calcext:value-type="string">
            <text:p>音楽</text:p>
          </table:table-cell>
          <table:table-cell table:formula="of:=IFERROR(VLOOKUP([.$S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IF(ISNA([.$S84]);&quot;null&quot;;&quot;&quot;&quot;&quot;&amp;[.$S84]&amp;&quot;&quot;&quot;&quot;);[$JSON.$E$1];[.$U84];[$JSON.$F$1];IF(ISNA([.$W84]);&quot;null&quot;;&quot;&quot;&quot;&quot;&amp;[.$W84]&amp;&quot;&quot;&quot;&quot;);[$JSON.$G$1];[.$Y84];[$JSON.$H$1];[.$H84];[$JSON.$I$1];[.J84];[$JSON.$J$1];[.$L84];[$JSON.$K$1];[.$O84];[$JSON.$L$1];[.$N84];[$JSON.$M$1];[.$R84];[$JSON.$N$1];[.$T84];[$JSON.$O$1];IF(ISNA([.$V84]);&quot;null&quot;;[.$V84]);[$JSON.$P$1];[.$X84];[$JSON.$Q$1];[.$A84];[$JSON.$R$1];[.$B84];[$JSON.$S$1])" office:value-type="string" office:string-value="{&quot;id&quot;:&quot;1-44&quot;,&quot;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orderTable&quot;:83,&quot;orderDeck&quot;:192}," calcext:value-type="string">
            <text:p>{"id":"1-44","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G85];[$収録番号.$A$1:$収録番号.$B$9];2;0)" office:value-type="float" office:value="15" calcext:value-type="float">
            <text:p>15</text:p>
          </table:table-cell>
          <table:table-cell office:value-type="string" calcext:value-type="string">
            <text:p>R</text:p>
          </table:table-cell>
          <table:table-cell table:formula="of:=VLOOKUP([.I85];[$レアリティ番号.$A$1:$レアリティ番号.$B$4];2;0)" office:value-type="float" office:value="2" calcext:value-type="float">
            <text:p>2</text:p>
          </table:table-cell>
          <table:table-cell office:value-type="string" calcext:value-type="string">
            <text:p>イジン</text:p>
          </table:table-cell>
          <table:table-cell table:formula="of:=VLOOKUP([.K85];[$種類番号.$A$1:$種類番号.$B$4];2;0)" office:value-type="float" office:value="1" calcext:value-type="float">
            <text:p>1</text:p>
          </table:table-cell>
          <table:table-cell office:value-type="string" calcext:value-type="string">
            <text:p>緑</text:p>
          </table:table-cell>
          <table:table-cell table:formula="of:=VLOOKUP([.M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IF(ISNA([.$S85]);&quot;null&quot;;&quot;&quot;&quot;&quot;&amp;[.$S85]&amp;&quot;&quot;&quot;&quot;);[$JSON.$E$1];[.$U85];[$JSON.$F$1];IF(ISNA([.$W85]);&quot;null&quot;;&quot;&quot;&quot;&quot;&amp;[.$W85]&amp;&quot;&quot;&quot;&quot;);[$JSON.$G$1];[.$Y85];[$JSON.$H$1];[.$H85];[$JSON.$I$1];[.J85];[$JSON.$J$1];[.$L85];[$JSON.$K$1];[.$O85];[$JSON.$L$1];[.$N85];[$JSON.$M$1];[.$R85];[$JSON.$N$1];[.$T85];[$JSON.$O$1];IF(ISNA([.$V85]);&quot;null&quot;;[.$V85]);[$JSON.$P$1];[.$X85];[$JSON.$Q$1];[.$A85];[$JSON.$R$1];[.$B85];[$JSON.$S$1])" office:value-type="string" office:string-value="{&quot;id&quot;:&quot;1-45&quot;,&quot;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orderTable&quot;:84,&quot;orderDeck&quot;:209}," calcext:value-type="string">
            <text:p>{"id":"1-45","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G86];[$収録番号.$A$1:$収録番号.$B$9];2;0)" office:value-type="float" office:value="15" calcext:value-type="float">
            <text:p>15</text:p>
          </table:table-cell>
          <table:table-cell office:value-type="string" calcext:value-type="string">
            <text:p>N</text:p>
          </table:table-cell>
          <table:table-cell table:formula="of:=VLOOKUP([.I86];[$レアリティ番号.$A$1:$レアリティ番号.$B$4];2;0)" office:value-type="float" office:value="1" calcext:value-type="float">
            <text:p>1</text:p>
          </table:table-cell>
          <table:table-cell office:value-type="string" calcext:value-type="string">
            <text:p>ハイケイ</text:p>
          </table:table-cell>
          <table:table-cell table:formula="of:=VLOOKUP([.K86];[$種類番号.$A$1:$種類番号.$B$4];2;0)" office:value-type="float" office:value="2" calcext:value-type="float">
            <text:p>2</text:p>
          </table:table-cell>
          <table:table-cell office:value-type="string" calcext:value-type="string">
            <text:p>赤</text:p>
          </table:table-cell>
          <table:table-cell table:formula="of:=VLOOKUP([.M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IF(ISNA([.$S86]);&quot;null&quot;;&quot;&quot;&quot;&quot;&amp;[.$S86]&amp;&quot;&quot;&quot;&quot;);[$JSON.$E$1];[.$U86];[$JSON.$F$1];IF(ISNA([.$W86]);&quot;null&quot;;&quot;&quot;&quot;&quot;&amp;[.$W86]&amp;&quot;&quot;&quot;&quot;);[$JSON.$G$1];[.$Y86];[$JSON.$H$1];[.$H86];[$JSON.$I$1];[.J86];[$JSON.$J$1];[.$L86];[$JSON.$K$1];[.$O86];[$JSON.$L$1];[.$N86];[$JSON.$M$1];[.$R86];[$JSON.$N$1];[.$T86];[$JSON.$O$1];IF(ISNA([.$V86]);&quot;null&quot;;[.$V86]);[$JSON.$P$1];[.$X86];[$JSON.$Q$1];[.$A86];[$JSON.$R$1];[.$B86];[$JSON.$S$1])" office:value-type="string" office:string-value="{&quot;id&quot;:&quot;1-46&quot;,&quot;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orderTable&quot;:85,&quot;orderDeck&quot;:259}," calcext:value-type="string">
            <text:p>{"id":"1-46","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G87];[$収録番号.$A$1:$収録番号.$B$9];2;0)" office:value-type="float" office:value="15" calcext:value-type="float">
            <text:p>15</text:p>
          </table:table-cell>
          <table:table-cell office:value-type="string" calcext:value-type="string">
            <text:p>N</text:p>
          </table:table-cell>
          <table:table-cell table:formula="of:=VLOOKUP([.I87];[$レアリティ番号.$A$1:$レアリティ番号.$B$4];2;0)" office:value-type="float" office:value="1" calcext:value-type="float">
            <text:p>1</text:p>
          </table:table-cell>
          <table:table-cell office:value-type="string" calcext:value-type="string">
            <text:p>ハイケイ</text:p>
          </table:table-cell>
          <table:table-cell table:formula="of:=VLOOKUP([.K87];[$種類番号.$A$1:$種類番号.$B$4];2;0)" office:value-type="float" office:value="2" calcext:value-type="float">
            <text:p>2</text:p>
          </table:table-cell>
          <table:table-cell office:value-type="string" calcext:value-type="string">
            <text:p>青</text:p>
          </table:table-cell>
          <table:table-cell table:formula="of:=VLOOKUP([.M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IF(ISNA([.$S87]);&quot;null&quot;;&quot;&quot;&quot;&quot;&amp;[.$S87]&amp;&quot;&quot;&quot;&quot;);[$JSON.$E$1];[.$U87];[$JSON.$F$1];IF(ISNA([.$W87]);&quot;null&quot;;&quot;&quot;&quot;&quot;&amp;[.$W87]&amp;&quot;&quot;&quot;&quot;);[$JSON.$G$1];[.$Y87];[$JSON.$H$1];[.$H87];[$JSON.$I$1];[.J87];[$JSON.$J$1];[.$L87];[$JSON.$K$1];[.$O87];[$JSON.$L$1];[.$N87];[$JSON.$M$1];[.$R87];[$JSON.$N$1];[.$T87];[$JSON.$O$1];IF(ISNA([.$V87]);&quot;null&quot;;[.$V87]);[$JSON.$P$1];[.$X87];[$JSON.$Q$1];[.$A87];[$JSON.$R$1];[.$B87];[$JSON.$S$1])" office:value-type="string" office:string-value="{&quot;id&quot;:&quot;1-47&quot;,&quot;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orderTable&quot;:86,&quot;orderDeck&quot;:260}," calcext:value-type="string">
            <text:p>{"id":"1-47","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G88];[$収録番号.$A$1:$収録番号.$B$9];2;0)" office:value-type="float" office:value="15" calcext:value-type="float">
            <text:p>15</text:p>
          </table:table-cell>
          <table:table-cell office:value-type="string" calcext:value-type="string">
            <text:p>N</text:p>
          </table:table-cell>
          <table:table-cell table:formula="of:=VLOOKUP([.I88];[$レアリティ番号.$A$1:$レアリティ番号.$B$4];2;0)" office:value-type="float" office:value="1" calcext:value-type="float">
            <text:p>1</text:p>
          </table:table-cell>
          <table:table-cell office:value-type="string" calcext:value-type="string">
            <text:p>ハイケイ</text:p>
          </table:table-cell>
          <table:table-cell table:formula="of:=VLOOKUP([.K88];[$種類番号.$A$1:$種類番号.$B$4];2;0)" office:value-type="float" office:value="2" calcext:value-type="float">
            <text:p>2</text:p>
          </table:table-cell>
          <table:table-cell office:value-type="string" calcext:value-type="string">
            <text:p>青</text:p>
          </table:table-cell>
          <table:table-cell table:formula="of:=VLOOKUP([.M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IF(ISNA([.$S88]);&quot;null&quot;;&quot;&quot;&quot;&quot;&amp;[.$S88]&amp;&quot;&quot;&quot;&quot;);[$JSON.$E$1];[.$U88];[$JSON.$F$1];IF(ISNA([.$W88]);&quot;null&quot;;&quot;&quot;&quot;&quot;&amp;[.$W88]&amp;&quot;&quot;&quot;&quot;);[$JSON.$G$1];[.$Y88];[$JSON.$H$1];[.$H88];[$JSON.$I$1];[.J88];[$JSON.$J$1];[.$L88];[$JSON.$K$1];[.$O88];[$JSON.$L$1];[.$N88];[$JSON.$M$1];[.$R88];[$JSON.$N$1];[.$T88];[$JSON.$O$1];IF(ISNA([.$V88]);&quot;null&quot;;[.$V88]);[$JSON.$P$1];[.$X88];[$JSON.$Q$1];[.$A88];[$JSON.$R$1];[.$B88];[$JSON.$S$1])" office:value-type="string" office:string-value="{&quot;id&quot;:&quot;1-48&quot;,&quot;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orderTable&quot;:87,&quot;orderDeck&quot;:267}," calcext:value-type="string">
            <text:p>{"id":"1-48","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G89];[$収録番号.$A$1:$収録番号.$B$9];2;0)" office:value-type="float" office:value="15" calcext:value-type="float">
            <text:p>15</text:p>
          </table:table-cell>
          <table:table-cell office:value-type="string" calcext:value-type="string">
            <text:p>N</text:p>
          </table:table-cell>
          <table:table-cell table:formula="of:=VLOOKUP([.I89];[$レアリティ番号.$A$1:$レアリティ番号.$B$4];2;0)" office:value-type="float" office:value="1" calcext:value-type="float">
            <text:p>1</text:p>
          </table:table-cell>
          <table:table-cell office:value-type="string" calcext:value-type="string">
            <text:p>ハイケイ</text:p>
          </table:table-cell>
          <table:table-cell table:formula="of:=VLOOKUP([.K89];[$種類番号.$A$1:$種類番号.$B$4];2;0)" office:value-type="float" office:value="2" calcext:value-type="float">
            <text:p>2</text:p>
          </table:table-cell>
          <table:table-cell office:value-type="string" calcext:value-type="string">
            <text:p>緑</text:p>
          </table:table-cell>
          <table:table-cell table:formula="of:=VLOOKUP([.M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IF(ISNA([.$S89]);&quot;null&quot;;&quot;&quot;&quot;&quot;&amp;[.$S89]&amp;&quot;&quot;&quot;&quot;);[$JSON.$E$1];[.$U89];[$JSON.$F$1];IF(ISNA([.$W89]);&quot;null&quot;;&quot;&quot;&quot;&quot;&amp;[.$W89]&amp;&quot;&quot;&quot;&quot;);[$JSON.$G$1];[.$Y89];[$JSON.$H$1];[.$H89];[$JSON.$I$1];[.J89];[$JSON.$J$1];[.$L89];[$JSON.$K$1];[.$O89];[$JSON.$L$1];[.$N89];[$JSON.$M$1];[.$R89];[$JSON.$N$1];[.$T89];[$JSON.$O$1];IF(ISNA([.$V89]);&quot;null&quot;;[.$V89]);[$JSON.$P$1];[.$X89];[$JSON.$Q$1];[.$A89];[$JSON.$R$1];[.$B89];[$JSON.$S$1])" office:value-type="string" office:string-value="{&quot;id&quot;:&quot;1-49&quot;,&quot;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orderTable&quot;:88,&quot;orderDeck&quot;:243}," calcext:value-type="string">
            <text:p>{"id":"1-49","name":"巨大古墳","kana":"きょだいこふん","traitText":null,"ruleText":"自分のスタートフェイズが終了したとき、マリョク配置権+1する。","legacyText":"魔力化","imageUrl":"https://one-draw.jp/ijinden/cardlist/001/card/01_049.png","expansion":15,"rarity":1,"type":2,"level":2,"color":4,"term":0,"trait":0,"power":null,"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G90];[$収録番号.$A$1:$収録番号.$B$9];2;0)" office:value-type="float" office:value="15" calcext:value-type="float">
            <text:p>15</text:p>
          </table:table-cell>
          <table:table-cell office:value-type="string" calcext:value-type="string">
            <text:p>N</text:p>
          </table:table-cell>
          <table:table-cell table:formula="of:=VLOOKUP([.I90];[$レアリティ番号.$A$1:$レアリティ番号.$B$4];2;0)" office:value-type="float" office:value="1" calcext:value-type="float">
            <text:p>1</text:p>
          </table:table-cell>
          <table:table-cell office:value-type="string" calcext:value-type="string">
            <text:p>ハイケイ</text:p>
          </table:table-cell>
          <table:table-cell table:formula="of:=VLOOKUP([.K90];[$種類番号.$A$1:$種類番号.$B$4];2;0)" office:value-type="float" office:value="2" calcext:value-type="float">
            <text:p>2</text:p>
          </table:table-cell>
          <table:table-cell office:value-type="string" calcext:value-type="string">
            <text:p>緑</text:p>
          </table:table-cell>
          <table:table-cell table:formula="of:=VLOOKUP([.M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IF(ISNA([.$S90]);&quot;null&quot;;&quot;&quot;&quot;&quot;&amp;[.$S90]&amp;&quot;&quot;&quot;&quot;);[$JSON.$E$1];[.$U90];[$JSON.$F$1];IF(ISNA([.$W90]);&quot;null&quot;;&quot;&quot;&quot;&quot;&amp;[.$W90]&amp;&quot;&quot;&quot;&quot;);[$JSON.$G$1];[.$Y90];[$JSON.$H$1];[.$H90];[$JSON.$I$1];[.J90];[$JSON.$J$1];[.$L90];[$JSON.$K$1];[.$O90];[$JSON.$L$1];[.$N90];[$JSON.$M$1];[.$R90];[$JSON.$N$1];[.$T90];[$JSON.$O$1];IF(ISNA([.$V90]);&quot;null&quot;;[.$V90]);[$JSON.$P$1];[.$X90];[$JSON.$Q$1];[.$A90];[$JSON.$R$1];[.$B90];[$JSON.$S$1])" office:value-type="string" office:string-value="{&quot;id&quot;:&quot;1-50&quot;,&quot;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orderTable&quot;:89,&quot;orderDeck&quot;:252}," calcext:value-type="string">
            <text:p>{"id":"1-50","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G91];[$収録番号.$A$1:$収録番号.$B$9];2;0)" office:value-type="float" office:value="15" calcext:value-type="float">
            <text:p>15</text:p>
          </table:table-cell>
          <table:table-cell office:value-type="string" calcext:value-type="string">
            <text:p>N</text:p>
          </table:table-cell>
          <table:table-cell table:formula="of:=VLOOKUP([.I91];[$レアリティ番号.$A$1:$レアリティ番号.$B$4];2;0)" office:value-type="float" office:value="1" calcext:value-type="float">
            <text:p>1</text:p>
          </table:table-cell>
          <table:table-cell office:value-type="string" calcext:value-type="string">
            <text:p>ハイケイ</text:p>
          </table:table-cell>
          <table:table-cell table:formula="of:=VLOOKUP([.K91];[$種類番号.$A$1:$種類番号.$B$4];2;0)" office:value-type="float" office:value="2" calcext:value-type="float">
            <text:p>2</text:p>
          </table:table-cell>
          <table:table-cell office:value-type="string" calcext:value-type="string">
            <text:p>緑</text:p>
          </table:table-cell>
          <table:table-cell table:formula="of:=VLOOKUP([.M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1];[$能力語番号.$A$1:$能力語番号.$B$10];2;0);0)" office:value-type="float" office:value="0" calcext:value-type="float">
            <text:p>0</text:p>
          </table:table-cell>
          <table:table-cell office:value-type="string" calcext:value-type="string">
            <text:p>美術</text:p>
          </table:table-cell>
          <table:table-cell table:formula="of:=IFERROR(VLOOKUP([.$S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IF(ISNA([.$S91]);&quot;null&quot;;&quot;&quot;&quot;&quot;&amp;[.$S91]&amp;&quot;&quot;&quot;&quot;);[$JSON.$E$1];[.$U91];[$JSON.$F$1];IF(ISNA([.$W91]);&quot;null&quot;;&quot;&quot;&quot;&quot;&amp;[.$W91]&amp;&quot;&quot;&quot;&quot;);[$JSON.$G$1];[.$Y91];[$JSON.$H$1];[.$H91];[$JSON.$I$1];[.J91];[$JSON.$J$1];[.$L91];[$JSON.$K$1];[.$O91];[$JSON.$L$1];[.$N91];[$JSON.$M$1];[.$R91];[$JSON.$N$1];[.$T91];[$JSON.$O$1];IF(ISNA([.$V91]);&quot;null&quot;;[.$V91]);[$JSON.$P$1];[.$X91];[$JSON.$Q$1];[.$A91];[$JSON.$R$1];[.$B91];[$JSON.$S$1])" office:value-type="string" office:string-value="{&quot;id&quot;:&quot;1-51&quot;,&quot;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orderTable&quot;:90,&quot;orderDeck&quot;:269}," calcext:value-type="string">
            <text:p>{"id":"1-51","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G92];[$収録番号.$A$1:$収録番号.$B$9];2;0)" office:value-type="float" office:value="15" calcext:value-type="float">
            <text:p>15</text:p>
          </table:table-cell>
          <table:table-cell office:value-type="string" calcext:value-type="string">
            <text:p>N</text:p>
          </table:table-cell>
          <table:table-cell table:formula="of:=VLOOKUP([.I92];[$レアリティ番号.$A$1:$レアリティ番号.$B$4];2;0)" office:value-type="float" office:value="1" calcext:value-type="float">
            <text:p>1</text:p>
          </table:table-cell>
          <table:table-cell office:value-type="string" calcext:value-type="string">
            <text:p>マホウ</text:p>
          </table:table-cell>
          <table:table-cell table:formula="of:=VLOOKUP([.K92];[$種類番号.$A$1:$種類番号.$B$4];2;0)" office:value-type="float" office:value="3" calcext:value-type="float">
            <text:p>3</text:p>
          </table:table-cell>
          <table:table-cell office:value-type="string" calcext:value-type="string">
            <text:p>赤</text:p>
          </table:table-cell>
          <table:table-cell table:formula="of:=VLOOKUP([.M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IF(ISNA([.$S92]);&quot;null&quot;;&quot;&quot;&quot;&quot;&amp;[.$S92]&amp;&quot;&quot;&quot;&quot;);[$JSON.$E$1];[.$U92];[$JSON.$F$1];IF(ISNA([.$W92]);&quot;null&quot;;&quot;&quot;&quot;&quot;&amp;[.$W92]&amp;&quot;&quot;&quot;&quot;);[$JSON.$G$1];[.$Y92];[$JSON.$H$1];[.$H92];[$JSON.$I$1];[.J92];[$JSON.$J$1];[.$L92];[$JSON.$K$1];[.$O92];[$JSON.$L$1];[.$N92];[$JSON.$M$1];[.$R92];[$JSON.$N$1];[.$T92];[$JSON.$O$1];IF(ISNA([.$V92]);&quot;null&quot;;[.$V92]);[$JSON.$P$1];[.$X92];[$JSON.$Q$1];[.$A92];[$JSON.$R$1];[.$B92];[$JSON.$S$1])" office:value-type="string" office:string-value="{&quot;id&quot;:&quot;1-52&quot;,&quot;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orderTable&quot;:91,&quot;orderDeck&quot;:303}," calcext:value-type="string">
            <text:p>{"id":"1-52","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G93];[$収録番号.$A$1:$収録番号.$B$9];2;0)" office:value-type="float" office:value="15" calcext:value-type="float">
            <text:p>15</text:p>
          </table:table-cell>
          <table:table-cell office:value-type="string" calcext:value-type="string">
            <text:p>R</text:p>
          </table:table-cell>
          <table:table-cell table:formula="of:=VLOOKUP([.I93];[$レアリティ番号.$A$1:$レアリティ番号.$B$4];2;0)" office:value-type="float" office:value="2" calcext:value-type="float">
            <text:p>2</text:p>
          </table:table-cell>
          <table:table-cell office:value-type="string" calcext:value-type="string">
            <text:p>マホウ</text:p>
          </table:table-cell>
          <table:table-cell table:formula="of:=VLOOKUP([.K93];[$種類番号.$A$1:$種類番号.$B$4];2;0)" office:value-type="float" office:value="3" calcext:value-type="float">
            <text:p>3</text:p>
          </table:table-cell>
          <table:table-cell office:value-type="string" calcext:value-type="string">
            <text:p>赤</text:p>
          </table:table-cell>
          <table:table-cell table:formula="of:=VLOOKUP([.M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IF(ISNA([.$S93]);&quot;null&quot;;&quot;&quot;&quot;&quot;&amp;[.$S93]&amp;&quot;&quot;&quot;&quot;);[$JSON.$E$1];[.$U93];[$JSON.$F$1];IF(ISNA([.$W93]);&quot;null&quot;;&quot;&quot;&quot;&quot;&amp;[.$W93]&amp;&quot;&quot;&quot;&quot;);[$JSON.$G$1];[.$Y93];[$JSON.$H$1];[.$H93];[$JSON.$I$1];[.J93];[$JSON.$J$1];[.$L93];[$JSON.$K$1];[.$O93];[$JSON.$L$1];[.$N93];[$JSON.$M$1];[.$R93];[$JSON.$N$1];[.$T93];[$JSON.$O$1];IF(ISNA([.$V93]);&quot;null&quot;;[.$V93]);[$JSON.$P$1];[.$X93];[$JSON.$Q$1];[.$A93];[$JSON.$R$1];[.$B93];[$JSON.$S$1])" office:value-type="string" office:string-value="{&quot;id&quot;:&quot;1-53&quot;,&quot;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orderTable&quot;:92,&quot;orderDeck&quot;:318}," calcext:value-type="string">
            <text:p>{"id":"1-53","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G94];[$収録番号.$A$1:$収録番号.$B$9];2;0)" office:value-type="float" office:value="15" calcext:value-type="float">
            <text:p>15</text:p>
          </table:table-cell>
          <table:table-cell office:value-type="string" calcext:value-type="string">
            <text:p>N</text:p>
          </table:table-cell>
          <table:table-cell table:formula="of:=VLOOKUP([.I94];[$レアリティ番号.$A$1:$レアリティ番号.$B$4];2;0)" office:value-type="float" office:value="1" calcext:value-type="float">
            <text:p>1</text:p>
          </table:table-cell>
          <table:table-cell office:value-type="string" calcext:value-type="string">
            <text:p>マホウ</text:p>
          </table:table-cell>
          <table:table-cell table:formula="of:=VLOOKUP([.K94];[$種類番号.$A$1:$種類番号.$B$4];2;0)" office:value-type="float" office:value="3" calcext:value-type="float">
            <text:p>3</text:p>
          </table:table-cell>
          <table:table-cell office:value-type="string" calcext:value-type="string">
            <text:p>赤</text:p>
          </table:table-cell>
          <table:table-cell table:formula="of:=VLOOKUP([.M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IF(ISNA([.$S94]);&quot;null&quot;;&quot;&quot;&quot;&quot;&amp;[.$S94]&amp;&quot;&quot;&quot;&quot;);[$JSON.$E$1];[.$U94];[$JSON.$F$1];IF(ISNA([.$W94]);&quot;null&quot;;&quot;&quot;&quot;&quot;&amp;[.$W94]&amp;&quot;&quot;&quot;&quot;);[$JSON.$G$1];[.$Y94];[$JSON.$H$1];[.$H94];[$JSON.$I$1];[.J94];[$JSON.$J$1];[.$L94];[$JSON.$K$1];[.$O94];[$JSON.$L$1];[.$N94];[$JSON.$M$1];[.$R94];[$JSON.$N$1];[.$T94];[$JSON.$O$1];IF(ISNA([.$V94]);&quot;null&quot;;[.$V94]);[$JSON.$P$1];[.$X94];[$JSON.$Q$1];[.$A94];[$JSON.$R$1];[.$B94];[$JSON.$S$1])" office:value-type="string" office:string-value="{&quot;id&quot;:&quot;1-54&quot;,&quot;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orderTable&quot;:93,&quot;orderDeck&quot;:332}," calcext:value-type="string">
            <text:p>{"id":"1-54","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G95];[$収録番号.$A$1:$収録番号.$B$9];2;0)" office:value-type="float" office:value="15" calcext:value-type="float">
            <text:p>15</text:p>
          </table:table-cell>
          <table:table-cell office:value-type="string" calcext:value-type="string">
            <text:p>N</text:p>
          </table:table-cell>
          <table:table-cell table:formula="of:=VLOOKUP([.I95];[$レアリティ番号.$A$1:$レアリティ番号.$B$4];2;0)" office:value-type="float" office:value="1" calcext:value-type="float">
            <text:p>1</text:p>
          </table:table-cell>
          <table:table-cell office:value-type="string" calcext:value-type="string">
            <text:p>マホウ</text:p>
          </table:table-cell>
          <table:table-cell table:formula="of:=VLOOKUP([.K95];[$種類番号.$A$1:$種類番号.$B$4];2;0)" office:value-type="float" office:value="3" calcext:value-type="float">
            <text:p>3</text:p>
          </table:table-cell>
          <table:table-cell office:value-type="string" calcext:value-type="string">
            <text:p>青</text:p>
          </table:table-cell>
          <table:table-cell table:formula="of:=VLOOKUP([.M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IF(ISNA([.$S95]);&quot;null&quot;;&quot;&quot;&quot;&quot;&amp;[.$S95]&amp;&quot;&quot;&quot;&quot;);[$JSON.$E$1];[.$U95];[$JSON.$F$1];IF(ISNA([.$W95]);&quot;null&quot;;&quot;&quot;&quot;&quot;&amp;[.$W95]&amp;&quot;&quot;&quot;&quot;);[$JSON.$G$1];[.$Y95];[$JSON.$H$1];[.$H95];[$JSON.$I$1];[.J95];[$JSON.$J$1];[.$L95];[$JSON.$K$1];[.$O95];[$JSON.$L$1];[.$N95];[$JSON.$M$1];[.$R95];[$JSON.$N$1];[.$T95];[$JSON.$O$1];IF(ISNA([.$V95]);&quot;null&quot;;[.$V95]);[$JSON.$P$1];[.$X95];[$JSON.$Q$1];[.$A95];[$JSON.$R$1];[.$B95];[$JSON.$S$1])" office:value-type="string" office:string-value="{&quot;id&quot;:&quot;1-55&quot;,&quot;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orderTable&quot;:94,&quot;orderDeck&quot;:294}," calcext:value-type="string">
            <text:p>{"id":"1-55","name":"ストーム","kana":"すとーむ","traitText":null,"ruleText":"戦場のイジン1体を指定して発動できる。そのイジンを手札に戻す。","legacyText":"冥府発動","imageUrl":"https://one-draw.jp/ijinden/cardlist/001/card/01_055.png","expansion":15,"rarity":1,"type":3,"level":2,"color":2,"term":0,"trait":0,"power":null,"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G96];[$収録番号.$A$1:$収録番号.$B$9];2;0)" office:value-type="float" office:value="15" calcext:value-type="float">
            <text:p>15</text:p>
          </table:table-cell>
          <table:table-cell office:value-type="string" calcext:value-type="string">
            <text:p>R</text:p>
          </table:table-cell>
          <table:table-cell table:formula="of:=VLOOKUP([.I96];[$レアリティ番号.$A$1:$レアリティ番号.$B$4];2;0)" office:value-type="float" office:value="2" calcext:value-type="float">
            <text:p>2</text:p>
          </table:table-cell>
          <table:table-cell office:value-type="string" calcext:value-type="string">
            <text:p>マホウ</text:p>
          </table:table-cell>
          <table:table-cell table:formula="of:=VLOOKUP([.K96];[$種類番号.$A$1:$種類番号.$B$4];2;0)" office:value-type="float" office:value="3" calcext:value-type="float">
            <text:p>3</text:p>
          </table:table-cell>
          <table:table-cell office:value-type="string" calcext:value-type="string">
            <text:p>青</text:p>
          </table:table-cell>
          <table:table-cell table:formula="of:=VLOOKUP([.M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IF(ISNA([.$S96]);&quot;null&quot;;&quot;&quot;&quot;&quot;&amp;[.$S96]&amp;&quot;&quot;&quot;&quot;);[$JSON.$E$1];[.$U96];[$JSON.$F$1];IF(ISNA([.$W96]);&quot;null&quot;;&quot;&quot;&quot;&quot;&amp;[.$W96]&amp;&quot;&quot;&quot;&quot;);[$JSON.$G$1];[.$Y96];[$JSON.$H$1];[.$H96];[$JSON.$I$1];[.J96];[$JSON.$J$1];[.$L96];[$JSON.$K$1];[.$O96];[$JSON.$L$1];[.$N96];[$JSON.$M$1];[.$R96];[$JSON.$N$1];[.$T96];[$JSON.$O$1];IF(ISNA([.$V96]);&quot;null&quot;;[.$V96]);[$JSON.$P$1];[.$X96];[$JSON.$Q$1];[.$A96];[$JSON.$R$1];[.$B96];[$JSON.$S$1])" office:value-type="string" office:string-value="{&quot;id&quot;:&quot;1-56&quot;,&quot;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orderTable&quot;:95,&quot;orderDeck&quot;:319}," calcext:value-type="string">
            <text:p>{"id":"1-56","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G97];[$収録番号.$A$1:$収録番号.$B$9];2;0)" office:value-type="float" office:value="15" calcext:value-type="float">
            <text:p>15</text:p>
          </table:table-cell>
          <table:table-cell office:value-type="string" calcext:value-type="string">
            <text:p>R</text:p>
          </table:table-cell>
          <table:table-cell table:formula="of:=VLOOKUP([.I97];[$レアリティ番号.$A$1:$レアリティ番号.$B$4];2;0)" office:value-type="float" office:value="2" calcext:value-type="float">
            <text:p>2</text:p>
          </table:table-cell>
          <table:table-cell office:value-type="string" calcext:value-type="string">
            <text:p>マホウ</text:p>
          </table:table-cell>
          <table:table-cell table:formula="of:=VLOOKUP([.K97];[$種類番号.$A$1:$種類番号.$B$4];2;0)" office:value-type="float" office:value="3" calcext:value-type="float">
            <text:p>3</text:p>
          </table:table-cell>
          <table:table-cell office:value-type="string" calcext:value-type="string">
            <text:p>緑</text:p>
          </table:table-cell>
          <table:table-cell table:formula="of:=VLOOKUP([.M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IF(ISNA([.$S97]);&quot;null&quot;;&quot;&quot;&quot;&quot;&amp;[.$S97]&amp;&quot;&quot;&quot;&quot;);[$JSON.$E$1];[.$U97];[$JSON.$F$1];IF(ISNA([.$W97]);&quot;null&quot;;&quot;&quot;&quot;&quot;&amp;[.$W97]&amp;&quot;&quot;&quot;&quot;);[$JSON.$G$1];[.$Y97];[$JSON.$H$1];[.$H97];[$JSON.$I$1];[.J97];[$JSON.$J$1];[.$L97];[$JSON.$K$1];[.$O97];[$JSON.$L$1];[.$N97];[$JSON.$M$1];[.$R97];[$JSON.$N$1];[.$T97];[$JSON.$O$1];IF(ISNA([.$V97]);&quot;null&quot;;[.$V97]);[$JSON.$P$1];[.$X97];[$JSON.$Q$1];[.$A97];[$JSON.$R$1];[.$B97];[$JSON.$S$1])" office:value-type="string" office:string-value="{&quot;id&quot;:&quot;1-57&quot;,&quot;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orderTable&quot;:96,&quot;orderDeck&quot;:321}," calcext:value-type="string">
            <text:p>{"id":"1-57","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G98];[$収録番号.$A$1:$収録番号.$B$9];2;0)" office:value-type="float" office:value="15" calcext:value-type="float">
            <text:p>15</text:p>
          </table:table-cell>
          <table:table-cell office:value-type="string" calcext:value-type="string">
            <text:p>N</text:p>
          </table:table-cell>
          <table:table-cell table:formula="of:=VLOOKUP([.I98];[$レアリティ番号.$A$1:$レアリティ番号.$B$4];2;0)" office:value-type="float" office:value="1" calcext:value-type="float">
            <text:p>1</text:p>
          </table:table-cell>
          <table:table-cell office:value-type="string" calcext:value-type="string">
            <text:p>マリョク</text:p>
          </table:table-cell>
          <table:table-cell table:formula="of:=VLOOKUP([.K98];[$種類番号.$A$1:$種類番号.$B$4];2;0)" office:value-type="float" office:value="4" calcext:value-type="float">
            <text:p>4</text:p>
          </table:table-cell>
          <table:table-cell office:value-type="string" calcext:value-type="string">
            <text:p>赤</text:p>
          </table:table-cell>
          <table:table-cell table:formula="of:=VLOOKUP([.M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8];[$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IF(ISNA([.$S98]);&quot;null&quot;;&quot;&quot;&quot;&quot;&amp;[.$S98]&amp;&quot;&quot;&quot;&quot;);[$JSON.$E$1];[.$U98];[$JSON.$F$1];IF(ISNA([.$W98]);&quot;null&quot;;&quot;&quot;&quot;&quot;&amp;[.$W98]&amp;&quot;&quot;&quot;&quot;);[$JSON.$G$1];[.$Y98];[$JSON.$H$1];[.$H98];[$JSON.$I$1];[.J98];[$JSON.$J$1];[.$L98];[$JSON.$K$1];[.$O98];[$JSON.$L$1];[.$N98];[$JSON.$M$1];[.$R98];[$JSON.$N$1];[.$T98];[$JSON.$O$1];IF(ISNA([.$V98]);&quot;null&quot;;[.$V98]);[$JSON.$P$1];[.$X98];[$JSON.$Q$1];[.$A98];[$JSON.$R$1];[.$B98];[$JSON.$S$1])" office:value-type="string" office:string-value="{&quot;id&quot;:&quot;1-58&quot;,&quot;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orderTable&quot;:97,&quot;orderDeck&quot;:344}," calcext:value-type="string">
            <text:p>{"id":"1-58","name":"カンテラ","kana":"かんてら","traitText":null,"ruleText":"魔力ゾーンに置かれたとき、1ドローする。","legacyText":null,"imageUrl":"https://one-draw.jp/ijinden/cardlist/001/card/01_058.png","expansion":15,"rarity":1,"type":4,"level":1,"color":1,"term":0,"trait":0,"power":null,"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G99];[$収録番号.$A$1:$収録番号.$B$9];2;0)" office:value-type="float" office:value="15" calcext:value-type="float">
            <text:p>15</text:p>
          </table:table-cell>
          <table:table-cell office:value-type="string" calcext:value-type="string">
            <text:p>N</text:p>
          </table:table-cell>
          <table:table-cell table:formula="of:=VLOOKUP([.I99];[$レアリティ番号.$A$1:$レアリティ番号.$B$4];2;0)" office:value-type="float" office:value="1" calcext:value-type="float">
            <text:p>1</text:p>
          </table:table-cell>
          <table:table-cell office:value-type="string" calcext:value-type="string">
            <text:p>マリョク</text:p>
          </table:table-cell>
          <table:table-cell table:formula="of:=VLOOKUP([.K99];[$種類番号.$A$1:$種類番号.$B$4];2;0)" office:value-type="float" office:value="4" calcext:value-type="float">
            <text:p>4</text:p>
          </table:table-cell>
          <table:table-cell office:value-type="string" calcext:value-type="string">
            <text:p>赤</text:p>
          </table:table-cell>
          <table:table-cell table:formula="of:=VLOOKUP([.M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IF(ISNA([.$S99]);&quot;null&quot;;&quot;&quot;&quot;&quot;&amp;[.$S99]&amp;&quot;&quot;&quot;&quot;);[$JSON.$E$1];[.$U99];[$JSON.$F$1];IF(ISNA([.$W99]);&quot;null&quot;;&quot;&quot;&quot;&quot;&amp;[.$W99]&amp;&quot;&quot;&quot;&quot;);[$JSON.$G$1];[.$Y99];[$JSON.$H$1];[.$H99];[$JSON.$I$1];[.J99];[$JSON.$J$1];[.$L99];[$JSON.$K$1];[.$O99];[$JSON.$L$1];[.$N99];[$JSON.$M$1];[.$R99];[$JSON.$N$1];[.$T99];[$JSON.$O$1];IF(ISNA([.$V99]);&quot;null&quot;;[.$V99]);[$JSON.$P$1];[.$X99];[$JSON.$Q$1];[.$A99];[$JSON.$R$1];[.$B99];[$JSON.$S$1])" office:value-type="string" office:string-value="{&quot;id&quot;:&quot;1-59&quot;,&quot;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orderTable&quot;:98,&quot;orderDeck&quot;:345}," calcext:value-type="string">
            <text:p>{"id":"1-59","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G100];[$収録番号.$A$1:$収録番号.$B$9];2;0)" office:value-type="float" office:value="15" calcext:value-type="float">
            <text:p>15</text:p>
          </table:table-cell>
          <table:table-cell office:value-type="string" calcext:value-type="string">
            <text:p>N</text:p>
          </table:table-cell>
          <table:table-cell table:formula="of:=VLOOKUP([.I100];[$レアリティ番号.$A$1:$レアリティ番号.$B$4];2;0)" office:value-type="float" office:value="1" calcext:value-type="float">
            <text:p>1</text:p>
          </table:table-cell>
          <table:table-cell office:value-type="string" calcext:value-type="string">
            <text:p>マリョク</text:p>
          </table:table-cell>
          <table:table-cell table:formula="of:=VLOOKUP([.K100];[$種類番号.$A$1:$種類番号.$B$4];2;0)" office:value-type="float" office:value="4" calcext:value-type="float">
            <text:p>4</text:p>
          </table:table-cell>
          <table:table-cell office:value-type="string" calcext:value-type="string">
            <text:p>赤</text:p>
          </table:table-cell>
          <table:table-cell table:formula="of:=VLOOKUP([.M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IF(ISNA([.$S100]);&quot;null&quot;;&quot;&quot;&quot;&quot;&amp;[.$S100]&amp;&quot;&quot;&quot;&quot;);[$JSON.$E$1];[.$U100];[$JSON.$F$1];IF(ISNA([.$W100]);&quot;null&quot;;&quot;&quot;&quot;&quot;&amp;[.$W100]&amp;&quot;&quot;&quot;&quot;);[$JSON.$G$1];[.$Y100];[$JSON.$H$1];[.$H100];[$JSON.$I$1];[.J100];[$JSON.$J$1];[.$L100];[$JSON.$K$1];[.$O100];[$JSON.$L$1];[.$N100];[$JSON.$M$1];[.$R100];[$JSON.$N$1];[.$T100];[$JSON.$O$1];IF(ISNA([.$V100]);&quot;null&quot;;[.$V100]);[$JSON.$P$1];[.$X100];[$JSON.$Q$1];[.$A100];[$JSON.$R$1];[.$B100];[$JSON.$S$1])" office:value-type="string" office:string-value="{&quot;id&quot;:&quot;1-60&quot;,&quot;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orderTable&quot;:99,&quot;orderDeck&quot;:346}," calcext:value-type="string">
            <text:p>{"id":"1-60","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G101];[$収録番号.$A$1:$収録番号.$B$9];2;0)" office:value-type="float" office:value="15" calcext:value-type="float">
            <text:p>15</text:p>
          </table:table-cell>
          <table:table-cell office:value-type="string" calcext:value-type="string">
            <text:p>R</text:p>
          </table:table-cell>
          <table:table-cell table:formula="of:=VLOOKUP([.I101];[$レアリティ番号.$A$1:$レアリティ番号.$B$4];2;0)" office:value-type="float" office:value="2" calcext:value-type="float">
            <text:p>2</text:p>
          </table:table-cell>
          <table:table-cell office:value-type="string" calcext:value-type="string">
            <text:p>マリョク</text:p>
          </table:table-cell>
          <table:table-cell table:formula="of:=VLOOKUP([.K101];[$種類番号.$A$1:$種類番号.$B$4];2;0)" office:value-type="float" office:value="4" calcext:value-type="float">
            <text:p>4</text:p>
          </table:table-cell>
          <table:table-cell office:value-type="string" calcext:value-type="string">
            <text:p>赤</text:p>
          </table:table-cell>
          <table:table-cell table:formula="of:=VLOOKUP([.M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1];[$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IF(ISNA([.$S101]);&quot;null&quot;;&quot;&quot;&quot;&quot;&amp;[.$S101]&amp;&quot;&quot;&quot;&quot;);[$JSON.$E$1];[.$U101];[$JSON.$F$1];IF(ISNA([.$W101]);&quot;null&quot;;&quot;&quot;&quot;&quot;&amp;[.$W101]&amp;&quot;&quot;&quot;&quot;);[$JSON.$G$1];[.$Y101];[$JSON.$H$1];[.$H101];[$JSON.$I$1];[.J101];[$JSON.$J$1];[.$L101];[$JSON.$K$1];[.$O101];[$JSON.$L$1];[.$N101];[$JSON.$M$1];[.$R101];[$JSON.$N$1];[.$T101];[$JSON.$O$1];IF(ISNA([.$V101]);&quot;null&quot;;[.$V101]);[$JSON.$P$1];[.$X101];[$JSON.$Q$1];[.$A101];[$JSON.$R$1];[.$B101];[$JSON.$S$1])" office:value-type="string" office:string-value="{&quot;id&quot;:&quot;1-61&quot;,&quot;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orderTable&quot;:100,&quot;orderDeck&quot;:379}," calcext:value-type="string">
            <text:p>{"id":"1-61","name":"レッドオーブ","kana":"れっどおーぶ","traitText":null,"ruleText":"","legacyText":"復元","imageUrl":"https://one-draw.jp/ijinden/cardlist/001/card/01_061.png","expansion":15,"rarity":2,"type":4,"level":2,"color":1,"term":0,"trait":0,"power":null,"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G102];[$収録番号.$A$1:$収録番号.$B$9];2;0)" office:value-type="float" office:value="15" calcext:value-type="float">
            <text:p>15</text:p>
          </table:table-cell>
          <table:table-cell office:value-type="string" calcext:value-type="string">
            <text:p>N</text:p>
          </table:table-cell>
          <table:table-cell table:formula="of:=VLOOKUP([.I102];[$レアリティ番号.$A$1:$レアリティ番号.$B$4];2;0)" office:value-type="float" office:value="1" calcext:value-type="float">
            <text:p>1</text:p>
          </table:table-cell>
          <table:table-cell office:value-type="string" calcext:value-type="string">
            <text:p>マリョク</text:p>
          </table:table-cell>
          <table:table-cell table:formula="of:=VLOOKUP([.K102];[$種類番号.$A$1:$種類番号.$B$4];2;0)" office:value-type="float" office:value="4" calcext:value-type="float">
            <text:p>4</text:p>
          </table:table-cell>
          <table:table-cell office:value-type="string" calcext:value-type="string">
            <text:p>青</text:p>
          </table:table-cell>
          <table:table-cell table:formula="of:=VLOOKUP([.M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2];[$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IF(ISNA([.$S102]);&quot;null&quot;;&quot;&quot;&quot;&quot;&amp;[.$S102]&amp;&quot;&quot;&quot;&quot;);[$JSON.$E$1];[.$U102];[$JSON.$F$1];IF(ISNA([.$W102]);&quot;null&quot;;&quot;&quot;&quot;&quot;&amp;[.$W102]&amp;&quot;&quot;&quot;&quot;);[$JSON.$G$1];[.$Y102];[$JSON.$H$1];[.$H102];[$JSON.$I$1];[.J102];[$JSON.$J$1];[.$L102];[$JSON.$K$1];[.$O102];[$JSON.$L$1];[.$N102];[$JSON.$M$1];[.$R102];[$JSON.$N$1];[.$T102];[$JSON.$O$1];IF(ISNA([.$V102]);&quot;null&quot;;[.$V102]);[$JSON.$P$1];[.$X102];[$JSON.$Q$1];[.$A102];[$JSON.$R$1];[.$B102];[$JSON.$S$1])" office:value-type="string" office:string-value="{&quot;id&quot;:&quot;1-62&quot;,&quot;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orderTable&quot;:101,&quot;orderDeck&quot;:350}," calcext:value-type="string">
            <text:p>{"id":"1-62","name":"ウォーターポット","kana":"うぉーたーぽっと","traitText":null,"ruleText":"魔力ゾーンに置かれたとき、1ドローする。","legacyText":null,"imageUrl":"https://one-draw.jp/ijinden/cardlist/001/card/01_062.png","expansion":15,"rarity":1,"type":4,"level":1,"color":2,"term":0,"trait":0,"power":null,"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G103];[$収録番号.$A$1:$収録番号.$B$9];2;0)" office:value-type="float" office:value="15" calcext:value-type="float">
            <text:p>15</text:p>
          </table:table-cell>
          <table:table-cell office:value-type="string" calcext:value-type="string">
            <text:p>N</text:p>
          </table:table-cell>
          <table:table-cell table:formula="of:=VLOOKUP([.I103];[$レアリティ番号.$A$1:$レアリティ番号.$B$4];2;0)" office:value-type="float" office:value="1" calcext:value-type="float">
            <text:p>1</text:p>
          </table:table-cell>
          <table:table-cell office:value-type="string" calcext:value-type="string">
            <text:p>マリョク</text:p>
          </table:table-cell>
          <table:table-cell table:formula="of:=VLOOKUP([.K103];[$種類番号.$A$1:$種類番号.$B$4];2;0)" office:value-type="float" office:value="4" calcext:value-type="float">
            <text:p>4</text:p>
          </table:table-cell>
          <table:table-cell office:value-type="string" calcext:value-type="string">
            <text:p>青</text:p>
          </table:table-cell>
          <table:table-cell table:formula="of:=VLOOKUP([.M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IF(ISNA([.$S103]);&quot;null&quot;;&quot;&quot;&quot;&quot;&amp;[.$S103]&amp;&quot;&quot;&quot;&quot;);[$JSON.$E$1];[.$U103];[$JSON.$F$1];IF(ISNA([.$W103]);&quot;null&quot;;&quot;&quot;&quot;&quot;&amp;[.$W103]&amp;&quot;&quot;&quot;&quot;);[$JSON.$G$1];[.$Y103];[$JSON.$H$1];[.$H103];[$JSON.$I$1];[.J103];[$JSON.$J$1];[.$L103];[$JSON.$K$1];[.$O103];[$JSON.$L$1];[.$N103];[$JSON.$M$1];[.$R103];[$JSON.$N$1];[.$T103];[$JSON.$O$1];IF(ISNA([.$V103]);&quot;null&quot;;[.$V103]);[$JSON.$P$1];[.$X103];[$JSON.$Q$1];[.$A103];[$JSON.$R$1];[.$B103];[$JSON.$S$1])" office:value-type="string" office:string-value="{&quot;id&quot;:&quot;1-63&quot;,&quot;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orderTable&quot;:102,&quot;orderDeck&quot;:351}," calcext:value-type="string">
            <text:p>{"id":"1-63","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G104];[$収録番号.$A$1:$収録番号.$B$9];2;0)" office:value-type="float" office:value="15" calcext:value-type="float">
            <text:p>15</text:p>
          </table:table-cell>
          <table:table-cell office:value-type="string" calcext:value-type="string">
            <text:p>N</text:p>
          </table:table-cell>
          <table:table-cell table:formula="of:=VLOOKUP([.I104];[$レアリティ番号.$A$1:$レアリティ番号.$B$4];2;0)" office:value-type="float" office:value="1" calcext:value-type="float">
            <text:p>1</text:p>
          </table:table-cell>
          <table:table-cell office:value-type="string" calcext:value-type="string">
            <text:p>マリョク</text:p>
          </table:table-cell>
          <table:table-cell table:formula="of:=VLOOKUP([.K104];[$種類番号.$A$1:$種類番号.$B$4];2;0)" office:value-type="float" office:value="4" calcext:value-type="float">
            <text:p>4</text:p>
          </table:table-cell>
          <table:table-cell office:value-type="string" calcext:value-type="string">
            <text:p>青</text:p>
          </table:table-cell>
          <table:table-cell table:formula="of:=VLOOKUP([.M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IF(ISNA([.$S104]);&quot;null&quot;;&quot;&quot;&quot;&quot;&amp;[.$S104]&amp;&quot;&quot;&quot;&quot;);[$JSON.$E$1];[.$U104];[$JSON.$F$1];IF(ISNA([.$W104]);&quot;null&quot;;&quot;&quot;&quot;&quot;&amp;[.$W104]&amp;&quot;&quot;&quot;&quot;);[$JSON.$G$1];[.$Y104];[$JSON.$H$1];[.$H104];[$JSON.$I$1];[.J104];[$JSON.$J$1];[.$L104];[$JSON.$K$1];[.$O104];[$JSON.$L$1];[.$N104];[$JSON.$M$1];[.$R104];[$JSON.$N$1];[.$T104];[$JSON.$O$1];IF(ISNA([.$V104]);&quot;null&quot;;[.$V104]);[$JSON.$P$1];[.$X104];[$JSON.$Q$1];[.$A104];[$JSON.$R$1];[.$B104];[$JSON.$S$1])" office:value-type="string" office:string-value="{&quot;id&quot;:&quot;1-64&quot;,&quot;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orderTable&quot;:103,&quot;orderDeck&quot;:352}," calcext:value-type="string">
            <text:p>{"id":"1-64","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G105];[$収録番号.$A$1:$収録番号.$B$9];2;0)" office:value-type="float" office:value="15" calcext:value-type="float">
            <text:p>15</text:p>
          </table:table-cell>
          <table:table-cell office:value-type="string" calcext:value-type="string">
            <text:p>R</text:p>
          </table:table-cell>
          <table:table-cell table:formula="of:=VLOOKUP([.I105];[$レアリティ番号.$A$1:$レアリティ番号.$B$4];2;0)" office:value-type="float" office:value="2" calcext:value-type="float">
            <text:p>2</text:p>
          </table:table-cell>
          <table:table-cell office:value-type="string" calcext:value-type="string">
            <text:p>マリョク</text:p>
          </table:table-cell>
          <table:table-cell table:formula="of:=VLOOKUP([.K105];[$種類番号.$A$1:$種類番号.$B$4];2;0)" office:value-type="float" office:value="4" calcext:value-type="float">
            <text:p>4</text:p>
          </table:table-cell>
          <table:table-cell office:value-type="string" calcext:value-type="string">
            <text:p>青</text:p>
          </table:table-cell>
          <table:table-cell table:formula="of:=VLOOKUP([.M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5];[$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IF(ISNA([.$S105]);&quot;null&quot;;&quot;&quot;&quot;&quot;&amp;[.$S105]&amp;&quot;&quot;&quot;&quot;);[$JSON.$E$1];[.$U105];[$JSON.$F$1];IF(ISNA([.$W105]);&quot;null&quot;;&quot;&quot;&quot;&quot;&amp;[.$W105]&amp;&quot;&quot;&quot;&quot;);[$JSON.$G$1];[.$Y105];[$JSON.$H$1];[.$H105];[$JSON.$I$1];[.J105];[$JSON.$J$1];[.$L105];[$JSON.$K$1];[.$O105];[$JSON.$L$1];[.$N105];[$JSON.$M$1];[.$R105];[$JSON.$N$1];[.$T105];[$JSON.$O$1];IF(ISNA([.$V105]);&quot;null&quot;;[.$V105]);[$JSON.$P$1];[.$X105];[$JSON.$Q$1];[.$A105];[$JSON.$R$1];[.$B105];[$JSON.$S$1])" office:value-type="string" office:string-value="{&quot;id&quot;:&quot;1-65&quot;,&quot;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orderTable&quot;:104,&quot;orderDeck&quot;:380}," calcext:value-type="string">
            <text:p>{"id":"1-65","name":"ブルーオーブ","kana":"ぶるーおーぶ","traitText":null,"ruleText":"","legacyText":"復元","imageUrl":"https://one-draw.jp/ijinden/cardlist/001/card/01_065.png","expansion":15,"rarity":2,"type":4,"level":2,"color":2,"term":0,"trait":0,"power":null,"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G106];[$収録番号.$A$1:$収録番号.$B$9];2;0)" office:value-type="float" office:value="15" calcext:value-type="float">
            <text:p>15</text:p>
          </table:table-cell>
          <table:table-cell office:value-type="string" calcext:value-type="string">
            <text:p>N</text:p>
          </table:table-cell>
          <table:table-cell table:formula="of:=VLOOKUP([.I106];[$レアリティ番号.$A$1:$レアリティ番号.$B$4];2;0)" office:value-type="float" office:value="1" calcext:value-type="float">
            <text:p>1</text:p>
          </table:table-cell>
          <table:table-cell office:value-type="string" calcext:value-type="string">
            <text:p>マリョク</text:p>
          </table:table-cell>
          <table:table-cell table:formula="of:=VLOOKUP([.K106];[$種類番号.$A$1:$種類番号.$B$4];2;0)" office:value-type="float" office:value="4" calcext:value-type="float">
            <text:p>4</text:p>
          </table:table-cell>
          <table:table-cell office:value-type="string" calcext:value-type="string">
            <text:p>緑</text:p>
          </table:table-cell>
          <table:table-cell table:formula="of:=VLOOKUP([.M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IF(ISNA([.$S106]);&quot;null&quot;;&quot;&quot;&quot;&quot;&amp;[.$S106]&amp;&quot;&quot;&quot;&quot;);[$JSON.$E$1];[.$U106];[$JSON.$F$1];IF(ISNA([.$W106]);&quot;null&quot;;&quot;&quot;&quot;&quot;&amp;[.$W106]&amp;&quot;&quot;&quot;&quot;);[$JSON.$G$1];[.$Y106];[$JSON.$H$1];[.$H106];[$JSON.$I$1];[.J106];[$JSON.$J$1];[.$L106];[$JSON.$K$1];[.$O106];[$JSON.$L$1];[.$N106];[$JSON.$M$1];[.$R106];[$JSON.$N$1];[.$T106];[$JSON.$O$1];IF(ISNA([.$V106]);&quot;null&quot;;[.$V106]);[$JSON.$P$1];[.$X106];[$JSON.$Q$1];[.$A106];[$JSON.$R$1];[.$B106];[$JSON.$S$1])" office:value-type="string" office:string-value="{&quot;id&quot;:&quot;1-66&quot;,&quot;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orderTable&quot;:105,&quot;orderDeck&quot;:356}," calcext:value-type="string">
            <text:p>{"id":"1-66","name":"ポプリ","kana":"ぽぷり","traitText":null,"ruleText":"魔力ゾーンに置かれたとき、1ドローする。","legacyText":null,"imageUrl":"https://one-draw.jp/ijinden/cardlist/001/card/01_066.png","expansion":15,"rarity":1,"type":4,"level":1,"color":4,"term":0,"trait":0,"power":null,"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G107];[$収録番号.$A$1:$収録番号.$B$9];2;0)" office:value-type="float" office:value="15" calcext:value-type="float">
            <text:p>15</text:p>
          </table:table-cell>
          <table:table-cell office:value-type="string" calcext:value-type="string">
            <text:p>N</text:p>
          </table:table-cell>
          <table:table-cell table:formula="of:=VLOOKUP([.I107];[$レアリティ番号.$A$1:$レアリティ番号.$B$4];2;0)" office:value-type="float" office:value="1" calcext:value-type="float">
            <text:p>1</text:p>
          </table:table-cell>
          <table:table-cell office:value-type="string" calcext:value-type="string">
            <text:p>マリョク</text:p>
          </table:table-cell>
          <table:table-cell table:formula="of:=VLOOKUP([.K107];[$種類番号.$A$1:$種類番号.$B$4];2;0)" office:value-type="float" office:value="4" calcext:value-type="float">
            <text:p>4</text:p>
          </table:table-cell>
          <table:table-cell office:value-type="string" calcext:value-type="string">
            <text:p>緑</text:p>
          </table:table-cell>
          <table:table-cell table:formula="of:=VLOOKUP([.M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IF(ISNA([.$S107]);&quot;null&quot;;&quot;&quot;&quot;&quot;&amp;[.$S107]&amp;&quot;&quot;&quot;&quot;);[$JSON.$E$1];[.$U107];[$JSON.$F$1];IF(ISNA([.$W107]);&quot;null&quot;;&quot;&quot;&quot;&quot;&amp;[.$W107]&amp;&quot;&quot;&quot;&quot;);[$JSON.$G$1];[.$Y107];[$JSON.$H$1];[.$H107];[$JSON.$I$1];[.J107];[$JSON.$J$1];[.$L107];[$JSON.$K$1];[.$O107];[$JSON.$L$1];[.$N107];[$JSON.$M$1];[.$R107];[$JSON.$N$1];[.$T107];[$JSON.$O$1];IF(ISNA([.$V107]);&quot;null&quot;;[.$V107]);[$JSON.$P$1];[.$X107];[$JSON.$Q$1];[.$A107];[$JSON.$R$1];[.$B107];[$JSON.$S$1])" office:value-type="string" office:string-value="{&quot;id&quot;:&quot;1-67&quot;,&quot;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orderTable&quot;:106,&quot;orderDeck&quot;:357}," calcext:value-type="string">
            <text:p>{"id":"1-67","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G108];[$収録番号.$A$1:$収録番号.$B$9];2;0)" office:value-type="float" office:value="15" calcext:value-type="float">
            <text:p>15</text:p>
          </table:table-cell>
          <table:table-cell office:value-type="string" calcext:value-type="string">
            <text:p>N</text:p>
          </table:table-cell>
          <table:table-cell table:formula="of:=VLOOKUP([.I108];[$レアリティ番号.$A$1:$レアリティ番号.$B$4];2;0)" office:value-type="float" office:value="1" calcext:value-type="float">
            <text:p>1</text:p>
          </table:table-cell>
          <table:table-cell office:value-type="string" calcext:value-type="string">
            <text:p>マリョク</text:p>
          </table:table-cell>
          <table:table-cell table:formula="of:=VLOOKUP([.K108];[$種類番号.$A$1:$種類番号.$B$4];2;0)" office:value-type="float" office:value="4" calcext:value-type="float">
            <text:p>4</text:p>
          </table:table-cell>
          <table:table-cell office:value-type="string" calcext:value-type="string">
            <text:p>緑</text:p>
          </table:table-cell>
          <table:table-cell table:formula="of:=VLOOKUP([.M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IF(ISNA([.$S108]);&quot;null&quot;;&quot;&quot;&quot;&quot;&amp;[.$S108]&amp;&quot;&quot;&quot;&quot;);[$JSON.$E$1];[.$U108];[$JSON.$F$1];IF(ISNA([.$W108]);&quot;null&quot;;&quot;&quot;&quot;&quot;&amp;[.$W108]&amp;&quot;&quot;&quot;&quot;);[$JSON.$G$1];[.$Y108];[$JSON.$H$1];[.$H108];[$JSON.$I$1];[.J108];[$JSON.$J$1];[.$L108];[$JSON.$K$1];[.$O108];[$JSON.$L$1];[.$N108];[$JSON.$M$1];[.$R108];[$JSON.$N$1];[.$T108];[$JSON.$O$1];IF(ISNA([.$V108]);&quot;null&quot;;[.$V108]);[$JSON.$P$1];[.$X108];[$JSON.$Q$1];[.$A108];[$JSON.$R$1];[.$B108];[$JSON.$S$1])" office:value-type="string" office:string-value="{&quot;id&quot;:&quot;1-68&quot;,&quot;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orderTable&quot;:107,&quot;orderDeck&quot;:358}," calcext:value-type="string">
            <text:p>{"id":"1-68","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G109];[$収録番号.$A$1:$収録番号.$B$9];2;0)" office:value-type="float" office:value="15" calcext:value-type="float">
            <text:p>15</text:p>
          </table:table-cell>
          <table:table-cell office:value-type="string" calcext:value-type="string">
            <text:p>R</text:p>
          </table:table-cell>
          <table:table-cell table:formula="of:=VLOOKUP([.I109];[$レアリティ番号.$A$1:$レアリティ番号.$B$4];2;0)" office:value-type="float" office:value="2" calcext:value-type="float">
            <text:p>2</text:p>
          </table:table-cell>
          <table:table-cell office:value-type="string" calcext:value-type="string">
            <text:p>マリョク</text:p>
          </table:table-cell>
          <table:table-cell table:formula="of:=VLOOKUP([.K109];[$種類番号.$A$1:$種類番号.$B$4];2;0)" office:value-type="float" office:value="4" calcext:value-type="float">
            <text:p>4</text:p>
          </table:table-cell>
          <table:table-cell office:value-type="string" calcext:value-type="string">
            <text:p>緑</text:p>
          </table:table-cell>
          <table:table-cell table:formula="of:=VLOOKUP([.M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IF(ISNA([.$S109]);&quot;null&quot;;&quot;&quot;&quot;&quot;&amp;[.$S109]&amp;&quot;&quot;&quot;&quot;);[$JSON.$E$1];[.$U109];[$JSON.$F$1];IF(ISNA([.$W109]);&quot;null&quot;;&quot;&quot;&quot;&quot;&amp;[.$W109]&amp;&quot;&quot;&quot;&quot;);[$JSON.$G$1];[.$Y109];[$JSON.$H$1];[.$H109];[$JSON.$I$1];[.J109];[$JSON.$J$1];[.$L109];[$JSON.$K$1];[.$O109];[$JSON.$L$1];[.$N109];[$JSON.$M$1];[.$R109];[$JSON.$N$1];[.$T109];[$JSON.$O$1];IF(ISNA([.$V109]);&quot;null&quot;;[.$V109]);[$JSON.$P$1];[.$X109];[$JSON.$Q$1];[.$A109];[$JSON.$R$1];[.$B109];[$JSON.$S$1])" office:value-type="string" office:string-value="{&quot;id&quot;:&quot;1-69&quot;,&quot;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orderTable&quot;:108,&quot;orderDeck&quot;:381}," calcext:value-type="string">
            <text:p>{"id":"1-69","name":"グリーンオーブ","kana":"ぐりーんおーぶ","traitText":null,"ruleText":"","legacyText":"復元","imageUrl":"https://one-draw.jp/ijinden/cardlist/001/card/01_069.png","expansion":15,"rarity":2,"type":4,"level":2,"color":4,"term":0,"trait":0,"power":null,"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G110];[$収録番号.$A$1:$収録番号.$B$9];2;0)" office:value-type="float" office:value="15" calcext:value-type="float">
            <text:p>15</text:p>
          </table:table-cell>
          <table:table-cell office:value-type="string" calcext:value-type="string">
            <text:p>N</text:p>
          </table:table-cell>
          <table:table-cell table:formula="of:=VLOOKUP([.I110];[$レアリティ番号.$A$1:$レアリティ番号.$B$4];2;0)" office:value-type="float" office:value="1" calcext:value-type="float">
            <text:p>1</text:p>
          </table:table-cell>
          <table:table-cell office:value-type="string" calcext:value-type="string">
            <text:p>イジン</text:p>
          </table:table-cell>
          <table:table-cell table:formula="of:=VLOOKUP([.K110];[$種類番号.$A$1:$種類番号.$B$4];2;0)" office:value-type="float" office:value="1" calcext:value-type="float">
            <text:p>1</text:p>
          </table:table-cell>
          <table:table-cell office:value-type="string" calcext:value-type="string">
            <text:p>赤</text:p>
          </table:table-cell>
          <table:table-cell table:formula="of:=VLOOKUP([.M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IF(ISNA([.$S110]);&quot;null&quot;;&quot;&quot;&quot;&quot;&amp;[.$S110]&amp;&quot;&quot;&quot;&quot;);[$JSON.$E$1];[.$U110];[$JSON.$F$1];IF(ISNA([.$W110]);&quot;null&quot;;&quot;&quot;&quot;&quot;&amp;[.$W110]&amp;&quot;&quot;&quot;&quot;);[$JSON.$G$1];[.$Y110];[$JSON.$H$1];[.$H110];[$JSON.$I$1];[.J110];[$JSON.$J$1];[.$L110];[$JSON.$K$1];[.$O110];[$JSON.$L$1];[.$N110];[$JSON.$M$1];[.$R110];[$JSON.$N$1];[.$T110];[$JSON.$O$1];IF(ISNA([.$V110]);&quot;null&quot;;[.$V110]);[$JSON.$P$1];[.$X110];[$JSON.$Q$1];[.$A110];[$JSON.$R$1];[.$B110];[$JSON.$S$1])" office:value-type="string" office:string-value="{&quot;id&quot;:&quot;1-70&quot;,&quot;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orderTable&quot;:109,&quot;orderDeck&quot;:68}," calcext:value-type="string">
            <text:p>{"id":"1-70","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G111];[$収録番号.$A$1:$収録番号.$B$9];2;0)" office:value-type="float" office:value="15" calcext:value-type="float">
            <text:p>15</text:p>
          </table:table-cell>
          <table:table-cell office:value-type="string" calcext:value-type="string">
            <text:p>N</text:p>
          </table:table-cell>
          <table:table-cell table:formula="of:=VLOOKUP([.I111];[$レアリティ番号.$A$1:$レアリティ番号.$B$4];2;0)" office:value-type="float" office:value="1" calcext:value-type="float">
            <text:p>1</text:p>
          </table:table-cell>
          <table:table-cell office:value-type="string" calcext:value-type="string">
            <text:p>イジン</text:p>
          </table:table-cell>
          <table:table-cell table:formula="of:=VLOOKUP([.K111];[$種類番号.$A$1:$種類番号.$B$4];2;0)" office:value-type="float" office:value="1" calcext:value-type="float">
            <text:p>1</text:p>
          </table:table-cell>
          <table:table-cell office:value-type="string" calcext:value-type="string">
            <text:p>赤</text:p>
          </table:table-cell>
          <table:table-cell table:formula="of:=VLOOKUP([.M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IF(ISNA([.$S111]);&quot;null&quot;;&quot;&quot;&quot;&quot;&amp;[.$S111]&amp;&quot;&quot;&quot;&quot;);[$JSON.$E$1];[.$U111];[$JSON.$F$1];IF(ISNA([.$W111]);&quot;null&quot;;&quot;&quot;&quot;&quot;&amp;[.$W111]&amp;&quot;&quot;&quot;&quot;);[$JSON.$G$1];[.$Y111];[$JSON.$H$1];[.$H111];[$JSON.$I$1];[.J111];[$JSON.$J$1];[.$L111];[$JSON.$K$1];[.$O111];[$JSON.$L$1];[.$N111];[$JSON.$M$1];[.$R111];[$JSON.$N$1];[.$T111];[$JSON.$O$1];IF(ISNA([.$V111]);&quot;null&quot;;[.$V111]);[$JSON.$P$1];[.$X111];[$JSON.$Q$1];[.$A111];[$JSON.$R$1];[.$B111];[$JSON.$S$1])" office:value-type="string" office:string-value="{&quot;id&quot;:&quot;1-71&quot;,&quot;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orderTable&quot;:110,&quot;orderDeck&quot;:3}," calcext:value-type="string">
            <text:p>{"id":"1-71","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G112];[$収録番号.$A$1:$収録番号.$B$9];2;0)" office:value-type="float" office:value="15" calcext:value-type="float">
            <text:p>15</text:p>
          </table:table-cell>
          <table:table-cell office:value-type="string" calcext:value-type="string">
            <text:p>N</text:p>
          </table:table-cell>
          <table:table-cell table:formula="of:=VLOOKUP([.I112];[$レアリティ番号.$A$1:$レアリティ番号.$B$4];2;0)" office:value-type="float" office:value="1" calcext:value-type="float">
            <text:p>1</text:p>
          </table:table-cell>
          <table:table-cell office:value-type="string" calcext:value-type="string">
            <text:p>イジン</text:p>
          </table:table-cell>
          <table:table-cell table:formula="of:=VLOOKUP([.K112];[$種類番号.$A$1:$種類番号.$B$4];2;0)" office:value-type="float" office:value="1" calcext:value-type="float">
            <text:p>1</text:p>
          </table:table-cell>
          <table:table-cell office:value-type="string" calcext:value-type="string">
            <text:p>赤</text:p>
          </table:table-cell>
          <table:table-cell table:formula="of:=VLOOKUP([.M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IF(ISNA([.$S112]);&quot;null&quot;;&quot;&quot;&quot;&quot;&amp;[.$S112]&amp;&quot;&quot;&quot;&quot;);[$JSON.$E$1];[.$U112];[$JSON.$F$1];IF(ISNA([.$W112]);&quot;null&quot;;&quot;&quot;&quot;&quot;&amp;[.$W112]&amp;&quot;&quot;&quot;&quot;);[$JSON.$G$1];[.$Y112];[$JSON.$H$1];[.$H112];[$JSON.$I$1];[.J112];[$JSON.$J$1];[.$L112];[$JSON.$K$1];[.$O112];[$JSON.$L$1];[.$N112];[$JSON.$M$1];[.$R112];[$JSON.$N$1];[.$T112];[$JSON.$O$1];IF(ISNA([.$V112]);&quot;null&quot;;[.$V112]);[$JSON.$P$1];[.$X112];[$JSON.$Q$1];[.$A112];[$JSON.$R$1];[.$B112];[$JSON.$S$1])" office:value-type="string" office:string-value="{&quot;id&quot;:&quot;1-72&quot;,&quot;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orderTable&quot;:111,&quot;orderDeck&quot;:27}," calcext:value-type="string">
            <text:p>{"id":"1-72","name":"大江広元","kana":"おおえのひろもと","traitText":null,"ruleText":"相手の戦場のイジンが破壊されるたび、1ドローする。","legacyText":"1ドローする","imageUrl":"https://one-draw.jp/ijinden/cardlist/001/card/01_072.png","expansion":15,"rarity":1,"type":1,"level":2,"color":1,"term":0,"trait":0,"power":100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G113];[$収録番号.$A$1:$収録番号.$B$9];2;0)" office:value-type="float" office:value="15" calcext:value-type="float">
            <text:p>15</text:p>
          </table:table-cell>
          <table:table-cell office:value-type="string" calcext:value-type="string">
            <text:p>N</text:p>
          </table:table-cell>
          <table:table-cell table:formula="of:=VLOOKUP([.I113];[$レアリティ番号.$A$1:$レアリティ番号.$B$4];2;0)" office:value-type="float" office:value="1" calcext:value-type="float">
            <text:p>1</text:p>
          </table:table-cell>
          <table:table-cell office:value-type="string" calcext:value-type="string">
            <text:p>イジン</text:p>
          </table:table-cell>
          <table:table-cell table:formula="of:=VLOOKUP([.K113];[$種類番号.$A$1:$種類番号.$B$4];2;0)" office:value-type="float" office:value="1" calcext:value-type="float">
            <text:p>1</text:p>
          </table:table-cell>
          <table:table-cell office:value-type="string" calcext:value-type="string">
            <text:p>青</text:p>
          </table:table-cell>
          <table:table-cell table:formula="of:=VLOOKUP([.M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IF(ISNA([.$S113]);&quot;null&quot;;&quot;&quot;&quot;&quot;&amp;[.$S113]&amp;&quot;&quot;&quot;&quot;);[$JSON.$E$1];[.$U113];[$JSON.$F$1];IF(ISNA([.$W113]);&quot;null&quot;;&quot;&quot;&quot;&quot;&amp;[.$W113]&amp;&quot;&quot;&quot;&quot;);[$JSON.$G$1];[.$Y113];[$JSON.$H$1];[.$H113];[$JSON.$I$1];[.J113];[$JSON.$J$1];[.$L113];[$JSON.$K$1];[.$O113];[$JSON.$L$1];[.$N113];[$JSON.$M$1];[.$R113];[$JSON.$N$1];[.$T113];[$JSON.$O$1];IF(ISNA([.$V113]);&quot;null&quot;;[.$V113]);[$JSON.$P$1];[.$X113];[$JSON.$Q$1];[.$A113];[$JSON.$R$1];[.$B113];[$JSON.$S$1])" office:value-type="string" office:string-value="{&quot;id&quot;:&quot;1-73&quot;,&quot;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orderTable&quot;:112,&quot;orderDeck&quot;:117}," calcext:value-type="string">
            <text:p>{"id":"1-73","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G114];[$収録番号.$A$1:$収録番号.$B$9];2;0)" office:value-type="float" office:value="15" calcext:value-type="float">
            <text:p>15</text:p>
          </table:table-cell>
          <table:table-cell office:value-type="string" calcext:value-type="string">
            <text:p>N</text:p>
          </table:table-cell>
          <table:table-cell table:formula="of:=VLOOKUP([.I114];[$レアリティ番号.$A$1:$レアリティ番号.$B$4];2;0)" office:value-type="float" office:value="1" calcext:value-type="float">
            <text:p>1</text:p>
          </table:table-cell>
          <table:table-cell office:value-type="string" calcext:value-type="string">
            <text:p>イジン</text:p>
          </table:table-cell>
          <table:table-cell table:formula="of:=VLOOKUP([.K114];[$種類番号.$A$1:$種類番号.$B$4];2;0)" office:value-type="float" office:value="1" calcext:value-type="float">
            <text:p>1</text:p>
          </table:table-cell>
          <table:table-cell office:value-type="string" calcext:value-type="string">
            <text:p>青</text:p>
          </table:table-cell>
          <table:table-cell table:formula="of:=VLOOKUP([.M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IF(ISNA([.$S114]);&quot;null&quot;;&quot;&quot;&quot;&quot;&amp;[.$S114]&amp;&quot;&quot;&quot;&quot;);[$JSON.$E$1];[.$U114];[$JSON.$F$1];IF(ISNA([.$W114]);&quot;null&quot;;&quot;&quot;&quot;&quot;&amp;[.$W114]&amp;&quot;&quot;&quot;&quot;);[$JSON.$G$1];[.$Y114];[$JSON.$H$1];[.$H114];[$JSON.$I$1];[.J114];[$JSON.$J$1];[.$L114];[$JSON.$K$1];[.$O114];[$JSON.$L$1];[.$N114];[$JSON.$M$1];[.$R114];[$JSON.$N$1];[.$T114];[$JSON.$O$1];IF(ISNA([.$V114]);&quot;null&quot;;[.$V114]);[$JSON.$P$1];[.$X114];[$JSON.$Q$1];[.$A114];[$JSON.$R$1];[.$B114];[$JSON.$S$1])" office:value-type="string" office:string-value="{&quot;id&quot;:&quot;1-74&quot;,&quot;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orderTable&quot;:113,&quot;orderDeck&quot;:118}," calcext:value-type="string">
            <text:p>{"id":"1-74","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G115];[$収録番号.$A$1:$収録番号.$B$9];2;0)" office:value-type="float" office:value="15" calcext:value-type="float">
            <text:p>15</text:p>
          </table:table-cell>
          <table:table-cell office:value-type="string" calcext:value-type="string">
            <text:p>N</text:p>
          </table:table-cell>
          <table:table-cell table:formula="of:=VLOOKUP([.I115];[$レアリティ番号.$A$1:$レアリティ番号.$B$4];2;0)" office:value-type="float" office:value="1" calcext:value-type="float">
            <text:p>1</text:p>
          </table:table-cell>
          <table:table-cell office:value-type="string" calcext:value-type="string">
            <text:p>イジン</text:p>
          </table:table-cell>
          <table:table-cell table:formula="of:=VLOOKUP([.K115];[$種類番号.$A$1:$種類番号.$B$4];2;0)" office:value-type="float" office:value="1" calcext:value-type="float">
            <text:p>1</text:p>
          </table:table-cell>
          <table:table-cell office:value-type="string" calcext:value-type="string">
            <text:p>青</text:p>
          </table:table-cell>
          <table:table-cell table:formula="of:=VLOOKUP([.M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IF(ISNA([.$S115]);&quot;null&quot;;&quot;&quot;&quot;&quot;&amp;[.$S115]&amp;&quot;&quot;&quot;&quot;);[$JSON.$E$1];[.$U115];[$JSON.$F$1];IF(ISNA([.$W115]);&quot;null&quot;;&quot;&quot;&quot;&quot;&amp;[.$W115]&amp;&quot;&quot;&quot;&quot;);[$JSON.$G$1];[.$Y115];[$JSON.$H$1];[.$H115];[$JSON.$I$1];[.J115];[$JSON.$J$1];[.$L115];[$JSON.$K$1];[.$O115];[$JSON.$L$1];[.$N115];[$JSON.$M$1];[.$R115];[$JSON.$N$1];[.$T115];[$JSON.$O$1];IF(ISNA([.$V115]);&quot;null&quot;;[.$V115]);[$JSON.$P$1];[.$X115];[$JSON.$Q$1];[.$A115];[$JSON.$R$1];[.$B115];[$JSON.$S$1])" office:value-type="string" office:string-value="{&quot;id&quot;:&quot;1-75&quot;,&quot;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orderTable&quot;:114,&quot;orderDeck&quot;:119}," calcext:value-type="string">
            <text:p>{"id":"1-75","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G116];[$収録番号.$A$1:$収録番号.$B$9];2;0)" office:value-type="float" office:value="15" calcext:value-type="float">
            <text:p>15</text:p>
          </table:table-cell>
          <table:table-cell office:value-type="string" calcext:value-type="string">
            <text:p>N</text:p>
          </table:table-cell>
          <table:table-cell table:formula="of:=VLOOKUP([.I116];[$レアリティ番号.$A$1:$レアリティ番号.$B$4];2;0)" office:value-type="float" office:value="1" calcext:value-type="float">
            <text:p>1</text:p>
          </table:table-cell>
          <table:table-cell office:value-type="string" calcext:value-type="string">
            <text:p>イジン</text:p>
          </table:table-cell>
          <table:table-cell table:formula="of:=VLOOKUP([.K116];[$種類番号.$A$1:$種類番号.$B$4];2;0)" office:value-type="float" office:value="1" calcext:value-type="float">
            <text:p>1</text:p>
          </table:table-cell>
          <table:table-cell office:value-type="string" calcext:value-type="string">
            <text:p>緑</text:p>
          </table:table-cell>
          <table:table-cell table:formula="of:=VLOOKUP([.M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IF(ISNA([.$S116]);&quot;null&quot;;&quot;&quot;&quot;&quot;&amp;[.$S116]&amp;&quot;&quot;&quot;&quot;);[$JSON.$E$1];[.$U116];[$JSON.$F$1];IF(ISNA([.$W116]);&quot;null&quot;;&quot;&quot;&quot;&quot;&amp;[.$W116]&amp;&quot;&quot;&quot;&quot;);[$JSON.$G$1];[.$Y116];[$JSON.$H$1];[.$H116];[$JSON.$I$1];[.J116];[$JSON.$J$1];[.$L116];[$JSON.$K$1];[.$O116];[$JSON.$L$1];[.$N116];[$JSON.$M$1];[.$R116];[$JSON.$N$1];[.$T116];[$JSON.$O$1];IF(ISNA([.$V116]);&quot;null&quot;;[.$V116]);[$JSON.$P$1];[.$X116];[$JSON.$Q$1];[.$A116];[$JSON.$R$1];[.$B116];[$JSON.$S$1])" office:value-type="string" office:string-value="{&quot;id&quot;:&quot;1-76&quot;,&quot;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orderTable&quot;:115,&quot;orderDeck&quot;:166}," calcext:value-type="string">
            <text:p>{"id":"1-76","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G117];[$収録番号.$A$1:$収録番号.$B$9];2;0)" office:value-type="float" office:value="15" calcext:value-type="float">
            <text:p>15</text:p>
          </table:table-cell>
          <table:table-cell office:value-type="string" calcext:value-type="string">
            <text:p>N</text:p>
          </table:table-cell>
          <table:table-cell table:formula="of:=VLOOKUP([.I117];[$レアリティ番号.$A$1:$レアリティ番号.$B$4];2;0)" office:value-type="float" office:value="1" calcext:value-type="float">
            <text:p>1</text:p>
          </table:table-cell>
          <table:table-cell office:value-type="string" calcext:value-type="string">
            <text:p>イジン</text:p>
          </table:table-cell>
          <table:table-cell table:formula="of:=VLOOKUP([.K117];[$種類番号.$A$1:$種類番号.$B$4];2;0)" office:value-type="float" office:value="1" calcext:value-type="float">
            <text:p>1</text:p>
          </table:table-cell>
          <table:table-cell office:value-type="string" calcext:value-type="string">
            <text:p>緑</text:p>
          </table:table-cell>
          <table:table-cell table:formula="of:=VLOOKUP([.M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7];[$特性番号.$A$1:$特性番号.$B$8];2;0);0)" office:value-type="float" office:value="0" calcext:value-type="float">
            <text:p>0</text:p>
          </table:table-cell>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IF(ISNA([.$S117]);&quot;null&quot;;&quot;&quot;&quot;&quot;&amp;[.$S117]&amp;&quot;&quot;&quot;&quot;);[$JSON.$E$1];[.$U117];[$JSON.$F$1];IF(ISNA([.$W117]);&quot;null&quot;;&quot;&quot;&quot;&quot;&amp;[.$W117]&amp;&quot;&quot;&quot;&quot;);[$JSON.$G$1];[.$Y117];[$JSON.$H$1];[.$H117];[$JSON.$I$1];[.J117];[$JSON.$J$1];[.$L117];[$JSON.$K$1];[.$O117];[$JSON.$L$1];[.$N117];[$JSON.$M$1];[.$R117];[$JSON.$N$1];[.$T117];[$JSON.$O$1];IF(ISNA([.$V117]);&quot;null&quot;;[.$V117]);[$JSON.$P$1];[.$X117];[$JSON.$Q$1];[.$A117];[$JSON.$R$1];[.$B117];[$JSON.$S$1])" office:value-type="string" office:string-value="{&quot;id&quot;:&quot;1-77&quot;,&quot;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orderTable&quot;:116,&quot;orderDeck&quot;:46}," calcext:value-type="string">
            <text:p>{"id":"1-77","name":"乾隆帝","kana":"けんりゅうてい","traitText":null,"ruleText":"","legacyText":null,"imageUrl":"https://one-draw.jp/ijinden/cardlist/001/card/01_077.png","expansion":15,"rarity":1,"type":1,"level":2,"color":4,"term":0,"trait":0,"power":300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G118];[$収録番号.$A$1:$収録番号.$B$9];2;0)" office:value-type="float" office:value="15" calcext:value-type="float">
            <text:p>15</text:p>
          </table:table-cell>
          <table:table-cell office:value-type="string" calcext:value-type="string">
            <text:p>N</text:p>
          </table:table-cell>
          <table:table-cell table:formula="of:=VLOOKUP([.I118];[$レアリティ番号.$A$1:$レアリティ番号.$B$4];2;0)" office:value-type="float" office:value="1" calcext:value-type="float">
            <text:p>1</text:p>
          </table:table-cell>
          <table:table-cell office:value-type="string" calcext:value-type="string">
            <text:p>イジン</text:p>
          </table:table-cell>
          <table:table-cell table:formula="of:=VLOOKUP([.K118];[$種類番号.$A$1:$種類番号.$B$4];2;0)" office:value-type="float" office:value="1" calcext:value-type="float">
            <text:p>1</text:p>
          </table:table-cell>
          <table:table-cell office:value-type="string" calcext:value-type="string">
            <text:p>緑</text:p>
          </table:table-cell>
          <table:table-cell table:formula="of:=VLOOKUP([.M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IF(ISNA([.$S118]);&quot;null&quot;;&quot;&quot;&quot;&quot;&amp;[.$S118]&amp;&quot;&quot;&quot;&quot;);[$JSON.$E$1];[.$U118];[$JSON.$F$1];IF(ISNA([.$W118]);&quot;null&quot;;&quot;&quot;&quot;&quot;&amp;[.$W118]&amp;&quot;&quot;&quot;&quot;);[$JSON.$G$1];[.$Y118];[$JSON.$H$1];[.$H118];[$JSON.$I$1];[.J118];[$JSON.$J$1];[.$L118];[$JSON.$K$1];[.$O118];[$JSON.$L$1];[.$N118];[$JSON.$M$1];[.$R118];[$JSON.$N$1];[.$T118];[$JSON.$O$1];IF(ISNA([.$V118]);&quot;null&quot;;[.$V118]);[$JSON.$P$1];[.$X118];[$JSON.$Q$1];[.$A118];[$JSON.$R$1];[.$B118];[$JSON.$S$1])" office:value-type="string" office:string-value="{&quot;id&quot;:&quot;1-78&quot;,&quot;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orderTable&quot;:117,&quot;orderDeck&quot;:88}," calcext:value-type="string">
            <text:p>{"id":"1-78","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G119];[$収録番号.$A$1:$収録番号.$B$9];2;0)" office:value-type="float" office:value="15" calcext:value-type="float">
            <text:p>15</text:p>
          </table:table-cell>
          <table:table-cell office:value-type="string" calcext:value-type="string">
            <text:p>N</text:p>
          </table:table-cell>
          <table:table-cell table:formula="of:=VLOOKUP([.I119];[$レアリティ番号.$A$1:$レアリティ番号.$B$4];2;0)" office:value-type="float" office:value="1" calcext:value-type="float">
            <text:p>1</text:p>
          </table:table-cell>
          <table:table-cell office:value-type="string" calcext:value-type="string">
            <text:p>イジン</text:p>
          </table:table-cell>
          <table:table-cell table:formula="of:=VLOOKUP([.K119];[$種類番号.$A$1:$種類番号.$B$4];2;0)" office:value-type="float" office:value="1" calcext:value-type="float">
            <text:p>1</text:p>
          </table:table-cell>
          <table:table-cell office:value-type="string" calcext:value-type="string">
            <text:p>緑</text:p>
          </table:table-cell>
          <table:table-cell table:formula="of:=VLOOKUP([.M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IF(ISNA([.$S119]);&quot;null&quot;;&quot;&quot;&quot;&quot;&amp;[.$S119]&amp;&quot;&quot;&quot;&quot;);[$JSON.$E$1];[.$U119];[$JSON.$F$1];IF(ISNA([.$W119]);&quot;null&quot;;&quot;&quot;&quot;&quot;&amp;[.$W119]&amp;&quot;&quot;&quot;&quot;);[$JSON.$G$1];[.$Y119];[$JSON.$H$1];[.$H119];[$JSON.$I$1];[.J119];[$JSON.$J$1];[.$L119];[$JSON.$K$1];[.$O119];[$JSON.$L$1];[.$N119];[$JSON.$M$1];[.$R119];[$JSON.$N$1];[.$T119];[$JSON.$O$1];IF(ISNA([.$V119]);&quot;null&quot;;[.$V119]);[$JSON.$P$1];[.$X119];[$JSON.$Q$1];[.$A119];[$JSON.$R$1];[.$B119];[$JSON.$S$1])" office:value-type="string" office:string-value="{&quot;id&quot;:&quot;1-79&quot;,&quot;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orderTable&quot;:118,&quot;orderDeck&quot;:167}," calcext:value-type="string">
            <text:p>{"id":"1-79","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G120];[$収録番号.$A$1:$収録番号.$B$9];2;0)" office:value-type="float" office:value="15" calcext:value-type="float">
            <text:p>15</text:p>
          </table:table-cell>
          <table:table-cell office:value-type="string" calcext:value-type="string">
            <text:p>N</text:p>
          </table:table-cell>
          <table:table-cell table:formula="of:=VLOOKUP([.I120];[$レアリティ番号.$A$1:$レアリティ番号.$B$4];2;0)" office:value-type="float" office:value="1" calcext:value-type="float">
            <text:p>1</text:p>
          </table:table-cell>
          <table:table-cell office:value-type="string" calcext:value-type="string">
            <text:p>イジン</text:p>
          </table:table-cell>
          <table:table-cell table:formula="of:=VLOOKUP([.K120];[$種類番号.$A$1:$種類番号.$B$4];2;0)" office:value-type="float" office:value="1" calcext:value-type="float">
            <text:p>1</text:p>
          </table:table-cell>
          <table:table-cell office:value-type="string" calcext:value-type="string">
            <text:p>緑</text:p>
          </table:table-cell>
          <table:table-cell table:formula="of:=VLOOKUP([.M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office:value-type="float" office:value="6000" calcext:value-type="float">
            <text:p>6000</text:p>
          </table:table-cell>
          <table:table-cell table:style-name="ce8" table:formula="of:=NA()" office:value-type="string" office:string-value="" calcext:value-type="error">
            <text:p>#N/A</text:p>
          </table:table-cell>
          <table:table-cell table:formula="of:=IFERROR(VLOOKUP([.$W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IF(ISNA([.$S120]);&quot;null&quot;;&quot;&quot;&quot;&quot;&amp;[.$S120]&amp;&quot;&quot;&quot;&quot;);[$JSON.$E$1];[.$U120];[$JSON.$F$1];IF(ISNA([.$W120]);&quot;null&quot;;&quot;&quot;&quot;&quot;&amp;[.$W120]&amp;&quot;&quot;&quot;&quot;);[$JSON.$G$1];[.$Y120];[$JSON.$H$1];[.$H120];[$JSON.$I$1];[.J120];[$JSON.$J$1];[.$L120];[$JSON.$K$1];[.$O120];[$JSON.$L$1];[.$N120];[$JSON.$M$1];[.$R120];[$JSON.$N$1];[.$T120];[$JSON.$O$1];IF(ISNA([.$V120]);&quot;null&quot;;[.$V120]);[$JSON.$P$1];[.$X120];[$JSON.$Q$1];[.$A120];[$JSON.$R$1];[.$B120];[$JSON.$S$1])" office:value-type="string" office:string-value="{&quot;id&quot;:&quot;1-80&quot;,&quot;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orderTable&quot;:119,&quot;orderDeck&quot;:193}," calcext:value-type="string">
            <text:p>{"id":"1-80","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G121];[$収録番号.$A$1:$収録番号.$B$9];2;0)" office:value-type="float" office:value="20" calcext:value-type="float">
            <text:p>20</text:p>
          </table:table-cell>
          <table:table-cell office:value-type="string" calcext:value-type="string">
            <text:p>SR</text:p>
          </table:table-cell>
          <table:table-cell table:formula="of:=VLOOKUP([.I121];[$レアリティ番号.$A$1:$レアリティ番号.$B$4];2;0)" office:value-type="float" office:value="4" calcext:value-type="float">
            <text:p>4</text:p>
          </table:table-cell>
          <table:table-cell office:value-type="string" calcext:value-type="string">
            <text:p>イジン</text:p>
          </table:table-cell>
          <table:table-cell table:formula="of:=VLOOKUP([.K121];[$種類番号.$A$1:$種類番号.$B$4];2;0)" office:value-type="float" office:value="1" calcext:value-type="float">
            <text:p>1</text:p>
          </table:table-cell>
          <table:table-cell office:value-type="string" calcext:value-type="string">
            <text:p>黄</text:p>
          </table:table-cell>
          <table:table-cell table:formula="of:=VLOOKUP([.M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office:value-type="float" office:value="4000" calcext:value-type="float">
            <text:p>4000</text:p>
          </table:table-cell>
          <table:table-cell table:style-name="ce8" office:value-type="string" calcext:value-type="string">
            <text:p>反魂</text:p>
          </table:table-cell>
          <table:table-cell table:formula="of:=IFERROR(VLOOKUP([.$W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IF(ISNA([.$S121]);&quot;null&quot;;&quot;&quot;&quot;&quot;&amp;[.$S121]&amp;&quot;&quot;&quot;&quot;);[$JSON.$E$1];[.$U121];[$JSON.$F$1];IF(ISNA([.$W121]);&quot;null&quot;;&quot;&quot;&quot;&quot;&amp;[.$W121]&amp;&quot;&quot;&quot;&quot;);[$JSON.$G$1];[.$Y121];[$JSON.$H$1];[.$H121];[$JSON.$I$1];[.J121];[$JSON.$J$1];[.$L121];[$JSON.$K$1];[.$O121];[$JSON.$L$1];[.$N121];[$JSON.$M$1];[.$R121];[$JSON.$N$1];[.$T121];[$JSON.$O$1];IF(ISNA([.$V121]);&quot;null&quot;;[.$V121]);[$JSON.$P$1];[.$X121];[$JSON.$Q$1];[.$A121];[$JSON.$R$1];[.$B121];[$JSON.$S$1])" office:value-type="string" office:string-value="{&quot;id&quot;:&quot;Y-1&quot;,&quot;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orderTable&quot;:120,&quot;orderDeck&quot;:196}," calcext:value-type="string">
            <text:p>{"id":"Y-1","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G122];[$収録番号.$A$1:$収録番号.$B$9];2;0)" office:value-type="float" office:value="20" calcext:value-type="float">
            <text:p>20</text:p>
          </table:table-cell>
          <table:table-cell office:value-type="string" calcext:value-type="string">
            <text:p>N</text:p>
          </table:table-cell>
          <table:table-cell table:formula="of:=VLOOKUP([.I122];[$レアリティ番号.$A$1:$レアリティ番号.$B$4];2;0)" office:value-type="float" office:value="1" calcext:value-type="float">
            <text:p>1</text:p>
          </table:table-cell>
          <table:table-cell office:value-type="string" calcext:value-type="string">
            <text:p>イジン</text:p>
          </table:table-cell>
          <table:table-cell table:formula="of:=VLOOKUP([.K122];[$種類番号.$A$1:$種類番号.$B$4];2;0)" office:value-type="float" office:value="1" calcext:value-type="float">
            <text:p>1</text:p>
          </table:table-cell>
          <table:table-cell office:value-type="string" calcext:value-type="string">
            <text:p>黄</text:p>
          </table:table-cell>
          <table:table-cell table:formula="of:=VLOOKUP([.M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2];[$能力語番号.$A$1:$能力語番号.$B$10];2;0);0)" office:value-type="float" office:value="0" calcext:value-type="float">
            <text:p>0</text:p>
          </table:table-cell>
          <table:table-cell office:value-type="string" calcext:value-type="string">
            <text:p>剣術</text:p>
          </table:table-cell>
          <table:table-cell table:formula="of:=IFERROR(VLOOKUP([.$S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IF(ISNA([.$S122]);&quot;null&quot;;&quot;&quot;&quot;&quot;&amp;[.$S122]&amp;&quot;&quot;&quot;&quot;);[$JSON.$E$1];[.$U122];[$JSON.$F$1];IF(ISNA([.$W122]);&quot;null&quot;;&quot;&quot;&quot;&quot;&amp;[.$W122]&amp;&quot;&quot;&quot;&quot;);[$JSON.$G$1];[.$Y122];[$JSON.$H$1];[.$H122];[$JSON.$I$1];[.J122];[$JSON.$J$1];[.$L122];[$JSON.$K$1];[.$O122];[$JSON.$L$1];[.$N122];[$JSON.$M$1];[.$R122];[$JSON.$N$1];[.$T122];[$JSON.$O$1];IF(ISNA([.$V122]);&quot;null&quot;;[.$V122]);[$JSON.$P$1];[.$X122];[$JSON.$Q$1];[.$A122];[$JSON.$R$1];[.$B122];[$JSON.$S$1])" office:value-type="string" office:string-value="{&quot;id&quot;:&quot;Y-2&quot;,&quot;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orderTable&quot;:121,&quot;orderDeck&quot;:52}," calcext:value-type="string">
            <text:p>{"id":"Y-2","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G123];[$収録番号.$A$1:$収録番号.$B$9];2;0)" office:value-type="float" office:value="20" calcext:value-type="float">
            <text:p>20</text:p>
          </table:table-cell>
          <table:table-cell office:value-type="string" calcext:value-type="string">
            <text:p>N</text:p>
          </table:table-cell>
          <table:table-cell table:formula="of:=VLOOKUP([.I123];[$レアリティ番号.$A$1:$レアリティ番号.$B$4];2;0)" office:value-type="float" office:value="1" calcext:value-type="float">
            <text:p>1</text:p>
          </table:table-cell>
          <table:table-cell office:value-type="string" calcext:value-type="string">
            <text:p>イジン</text:p>
          </table:table-cell>
          <table:table-cell table:formula="of:=VLOOKUP([.K123];[$種類番号.$A$1:$種類番号.$B$4];2;0)" office:value-type="float" office:value="1" calcext:value-type="float">
            <text:p>1</text:p>
          </table:table-cell>
          <table:table-cell office:value-type="string" calcext:value-type="string">
            <text:p>黄</text:p>
          </table:table-cell>
          <table:table-cell table:formula="of:=VLOOKUP([.M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office:value-type="float" office:value="3500" calcext:value-type="float">
            <text:p>3500</text:p>
          </table:table-cell>
          <table:table-cell table:style-name="ce8" office:value-type="string" calcext:value-type="string">
            <text:p>魔力化</text:p>
          </table:table-cell>
          <table:table-cell table:formula="of:=IFERROR(VLOOKUP([.$W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IF(ISNA([.$S123]);&quot;null&quot;;&quot;&quot;&quot;&quot;&amp;[.$S123]&amp;&quot;&quot;&quot;&quot;);[$JSON.$E$1];[.$U123];[$JSON.$F$1];IF(ISNA([.$W123]);&quot;null&quot;;&quot;&quot;&quot;&quot;&amp;[.$W123]&amp;&quot;&quot;&quot;&quot;);[$JSON.$G$1];[.$Y123];[$JSON.$H$1];[.$H123];[$JSON.$I$1];[.J123];[$JSON.$J$1];[.$L123];[$JSON.$K$1];[.$O123];[$JSON.$L$1];[.$N123];[$JSON.$M$1];[.$R123];[$JSON.$N$1];[.$T123];[$JSON.$O$1];IF(ISNA([.$V123]);&quot;null&quot;;[.$V123]);[$JSON.$P$1];[.$X123];[$JSON.$Q$1];[.$A123];[$JSON.$R$1];[.$B123];[$JSON.$S$1])" office:value-type="string" office:string-value="{&quot;id&quot;:&quot;Y-3&quot;,&quot;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orderTable&quot;:122,&quot;orderDeck&quot;:132}," calcext:value-type="string">
            <text:p>{"id":"Y-3","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G124];[$収録番号.$A$1:$収録番号.$B$9];2;0)" office:value-type="float" office:value="20" calcext:value-type="float">
            <text:p>20</text:p>
          </table:table-cell>
          <table:table-cell office:value-type="string" calcext:value-type="string">
            <text:p>N</text:p>
          </table:table-cell>
          <table:table-cell table:formula="of:=VLOOKUP([.I124];[$レアリティ番号.$A$1:$レアリティ番号.$B$4];2;0)" office:value-type="float" office:value="1" calcext:value-type="float">
            <text:p>1</text:p>
          </table:table-cell>
          <table:table-cell office:value-type="string" calcext:value-type="string">
            <text:p>イジン</text:p>
          </table:table-cell>
          <table:table-cell table:formula="of:=VLOOKUP([.K124];[$種類番号.$A$1:$種類番号.$B$4];2;0)" office:value-type="float" office:value="1" calcext:value-type="float">
            <text:p>1</text:p>
          </table:table-cell>
          <table:table-cell office:value-type="string" calcext:value-type="string">
            <text:p>黄</text:p>
          </table:table-cell>
          <table:table-cell table:formula="of:=VLOOKUP([.M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office:value-type="float" office:value="4500" calcext:value-type="float">
            <text:p>4500</text:p>
          </table:table-cell>
          <table:table-cell table:style-name="ce8" table:formula="of:=NA()" office:value-type="string" office:string-value="" calcext:value-type="error">
            <text:p>#N/A</text:p>
          </table:table-cell>
          <table:table-cell table:formula="of:=IFERROR(VLOOKUP([.$W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IF(ISNA([.$S124]);&quot;null&quot;;&quot;&quot;&quot;&quot;&amp;[.$S124]&amp;&quot;&quot;&quot;&quot;);[$JSON.$E$1];[.$U124];[$JSON.$F$1];IF(ISNA([.$W124]);&quot;null&quot;;&quot;&quot;&quot;&quot;&amp;[.$W124]&amp;&quot;&quot;&quot;&quot;);[$JSON.$G$1];[.$Y124];[$JSON.$H$1];[.$H124];[$JSON.$I$1];[.J124];[$JSON.$J$1];[.$L124];[$JSON.$K$1];[.$O124];[$JSON.$L$1];[.$N124];[$JSON.$M$1];[.$R124];[$JSON.$N$1];[.$T124];[$JSON.$O$1];IF(ISNA([.$V124]);&quot;null&quot;;[.$V124]);[$JSON.$P$1];[.$X124];[$JSON.$Q$1];[.$A124];[$JSON.$R$1];[.$B124];[$JSON.$S$1])" office:value-type="string" office:string-value="{&quot;id&quot;:&quot;Y-4&quot;,&quot;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orderTable&quot;:123,&quot;orderDeck&quot;:171}," calcext:value-type="string">
            <text:p>{"id":"Y-4","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G125];[$収録番号.$A$1:$収録番号.$B$9];2;0)" office:value-type="float" office:value="20" calcext:value-type="float">
            <text:p>20</text:p>
          </table:table-cell>
          <table:table-cell office:value-type="string" calcext:value-type="string">
            <text:p>N</text:p>
          </table:table-cell>
          <table:table-cell table:formula="of:=VLOOKUP([.I125];[$レアリティ番号.$A$1:$レアリティ番号.$B$4];2;0)" office:value-type="float" office:value="1" calcext:value-type="float">
            <text:p>1</text:p>
          </table:table-cell>
          <table:table-cell office:value-type="string" calcext:value-type="string">
            <text:p>イジン</text:p>
          </table:table-cell>
          <table:table-cell table:formula="of:=VLOOKUP([.K125];[$種類番号.$A$1:$種類番号.$B$4];2;0)" office:value-type="float" office:value="1" calcext:value-type="float">
            <text:p>1</text:p>
          </table:table-cell>
          <table:table-cell office:value-type="string" calcext:value-type="string">
            <text:p>黄</text:p>
          </table:table-cell>
          <table:table-cell table:formula="of:=VLOOKUP([.M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IF(ISNA([.$S125]);&quot;null&quot;;&quot;&quot;&quot;&quot;&amp;[.$S125]&amp;&quot;&quot;&quot;&quot;);[$JSON.$E$1];[.$U125];[$JSON.$F$1];IF(ISNA([.$W125]);&quot;null&quot;;&quot;&quot;&quot;&quot;&amp;[.$W125]&amp;&quot;&quot;&quot;&quot;);[$JSON.$G$1];[.$Y125];[$JSON.$H$1];[.$H125];[$JSON.$I$1];[.J125];[$JSON.$J$1];[.$L125];[$JSON.$K$1];[.$O125];[$JSON.$L$1];[.$N125];[$JSON.$M$1];[.$R125];[$JSON.$N$1];[.$T125];[$JSON.$O$1];IF(ISNA([.$V125]);&quot;null&quot;;[.$V125]);[$JSON.$P$1];[.$X125];[$JSON.$Q$1];[.$A125];[$JSON.$R$1];[.$B125];[$JSON.$S$1])" office:value-type="string" office:string-value="{&quot;id&quot;:&quot;Y-5&quot;,&quot;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orderTable&quot;:124,&quot;orderDeck&quot;:213}," calcext:value-type="string">
            <text:p>{"id":"Y-5","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G126];[$収録番号.$A$1:$収録番号.$B$9];2;0)" office:value-type="float" office:value="20" calcext:value-type="float">
            <text:p>20</text:p>
          </table:table-cell>
          <table:table-cell office:value-type="string" calcext:value-type="string">
            <text:p>N</text:p>
          </table:table-cell>
          <table:table-cell table:formula="of:=VLOOKUP([.I126];[$レアリティ番号.$A$1:$レアリティ番号.$B$4];2;0)" office:value-type="float" office:value="1" calcext:value-type="float">
            <text:p>1</text:p>
          </table:table-cell>
          <table:table-cell office:value-type="string" calcext:value-type="string">
            <text:p>イジン</text:p>
          </table:table-cell>
          <table:table-cell table:formula="of:=VLOOKUP([.K126];[$種類番号.$A$1:$種類番号.$B$4];2;0)" office:value-type="float" office:value="1" calcext:value-type="float">
            <text:p>1</text:p>
          </table:table-cell>
          <table:table-cell office:value-type="string" calcext:value-type="string">
            <text:p>黄</text:p>
          </table:table-cell>
          <table:table-cell table:formula="of:=VLOOKUP([.M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IF(ISNA([.$S126]);&quot;null&quot;;&quot;&quot;&quot;&quot;&amp;[.$S126]&amp;&quot;&quot;&quot;&quot;);[$JSON.$E$1];[.$U126];[$JSON.$F$1];IF(ISNA([.$W126]);&quot;null&quot;;&quot;&quot;&quot;&quot;&amp;[.$W126]&amp;&quot;&quot;&quot;&quot;);[$JSON.$G$1];[.$Y126];[$JSON.$H$1];[.$H126];[$JSON.$I$1];[.J126];[$JSON.$J$1];[.$L126];[$JSON.$K$1];[.$O126];[$JSON.$L$1];[.$N126];[$JSON.$M$1];[.$R126];[$JSON.$N$1];[.$T126];[$JSON.$O$1];IF(ISNA([.$V126]);&quot;null&quot;;[.$V126]);[$JSON.$P$1];[.$X126];[$JSON.$Q$1];[.$A126];[$JSON.$R$1];[.$B126];[$JSON.$S$1])" office:value-type="string" office:string-value="{&quot;id&quot;:&quot;Y-6&quot;,&quot;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orderTable&quot;:125,&quot;orderDeck&quot;:197}," calcext:value-type="string">
            <text:p>{"id":"Y-6","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G127];[$収録番号.$A$1:$収録番号.$B$9];2;0)" office:value-type="float" office:value="20" calcext:value-type="float">
            <text:p>20</text:p>
          </table:table-cell>
          <table:table-cell office:value-type="string" calcext:value-type="string">
            <text:p>N</text:p>
          </table:table-cell>
          <table:table-cell table:formula="of:=VLOOKUP([.I127];[$レアリティ番号.$A$1:$レアリティ番号.$B$4];2;0)" office:value-type="float" office:value="1" calcext:value-type="float">
            <text:p>1</text:p>
          </table:table-cell>
          <table:table-cell office:value-type="string" calcext:value-type="string">
            <text:p>イジン</text:p>
          </table:table-cell>
          <table:table-cell table:formula="of:=VLOOKUP([.K127];[$種類番号.$A$1:$種類番号.$B$4];2;0)" office:value-type="float" office:value="1" calcext:value-type="float">
            <text:p>1</text:p>
          </table:table-cell>
          <table:table-cell office:value-type="string" calcext:value-type="string">
            <text:p>黄</text:p>
          </table:table-cell>
          <table:table-cell table:formula="of:=VLOOKUP([.M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IF(ISNA([.$S127]);&quot;null&quot;;&quot;&quot;&quot;&quot;&amp;[.$S127]&amp;&quot;&quot;&quot;&quot;);[$JSON.$E$1];[.$U127];[$JSON.$F$1];IF(ISNA([.$W127]);&quot;null&quot;;&quot;&quot;&quot;&quot;&amp;[.$W127]&amp;&quot;&quot;&quot;&quot;);[$JSON.$G$1];[.$Y127];[$JSON.$H$1];[.$H127];[$JSON.$I$1];[.J127];[$JSON.$J$1];[.$L127];[$JSON.$K$1];[.$O127];[$JSON.$L$1];[.$N127];[$JSON.$M$1];[.$R127];[$JSON.$N$1];[.$T127];[$JSON.$O$1];IF(ISNA([.$V127]);&quot;null&quot;;[.$V127]);[$JSON.$P$1];[.$X127];[$JSON.$Q$1];[.$A127];[$JSON.$R$1];[.$B127];[$JSON.$S$1])" office:value-type="string" office:string-value="{&quot;id&quot;:&quot;Y-7&quot;,&quot;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orderTable&quot;:126,&quot;orderDeck&quot;:53}," calcext:value-type="string">
            <text:p>{"id":"Y-7","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G128];[$収録番号.$A$1:$収録番号.$B$9];2;0)" office:value-type="float" office:value="20" calcext:value-type="float">
            <text:p>20</text:p>
          </table:table-cell>
          <table:table-cell office:value-type="string" calcext:value-type="string">
            <text:p>N</text:p>
          </table:table-cell>
          <table:table-cell table:formula="of:=VLOOKUP([.I128];[$レアリティ番号.$A$1:$レアリティ番号.$B$4];2;0)" office:value-type="float" office:value="1" calcext:value-type="float">
            <text:p>1</text:p>
          </table:table-cell>
          <table:table-cell office:value-type="string" calcext:value-type="string">
            <text:p>イジン</text:p>
          </table:table-cell>
          <table:table-cell table:formula="of:=VLOOKUP([.K128];[$種類番号.$A$1:$種類番号.$B$4];2;0)" office:value-type="float" office:value="1" calcext:value-type="float">
            <text:p>1</text:p>
          </table:table-cell>
          <table:table-cell office:value-type="string" calcext:value-type="string">
            <text:p>黄</text:p>
          </table:table-cell>
          <table:table-cell table:formula="of:=VLOOKUP([.M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8];[$能力語番号.$A$1:$能力語番号.$B$10];2;0);0)" office:value-type="float" office:value="0" calcext:value-type="float">
            <text:p>0</text:p>
          </table:table-cell>
          <table:table-cell office:value-type="string" calcext:value-type="string">
            <text:p>美術</text:p>
          </table:table-cell>
          <table:table-cell table:formula="of:=IFERROR(VLOOKUP([.$S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IF(ISNA([.$S128]);&quot;null&quot;;&quot;&quot;&quot;&quot;&amp;[.$S128]&amp;&quot;&quot;&quot;&quot;);[$JSON.$E$1];[.$U128];[$JSON.$F$1];IF(ISNA([.$W128]);&quot;null&quot;;&quot;&quot;&quot;&quot;&amp;[.$W128]&amp;&quot;&quot;&quot;&quot;);[$JSON.$G$1];[.$Y128];[$JSON.$H$1];[.$H128];[$JSON.$I$1];[.J128];[$JSON.$J$1];[.$L128];[$JSON.$K$1];[.$O128];[$JSON.$L$1];[.$N128];[$JSON.$M$1];[.$R128];[$JSON.$N$1];[.$T128];[$JSON.$O$1];IF(ISNA([.$V128]);&quot;null&quot;;[.$V128]);[$JSON.$P$1];[.$X128];[$JSON.$Q$1];[.$A128];[$JSON.$R$1];[.$B128];[$JSON.$S$1])" office:value-type="string" office:string-value="{&quot;id&quot;:&quot;Y-8&quot;,&quot;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orderTable&quot;:127,&quot;orderDeck&quot;:15}," calcext:value-type="string">
            <text:p>{"id":"Y-8","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G129];[$収録番号.$A$1:$収録番号.$B$9];2;0)" office:value-type="float" office:value="20" calcext:value-type="float">
            <text:p>20</text:p>
          </table:table-cell>
          <table:table-cell office:value-type="string" calcext:value-type="string">
            <text:p>N</text:p>
          </table:table-cell>
          <table:table-cell table:formula="of:=VLOOKUP([.I129];[$レアリティ番号.$A$1:$レアリティ番号.$B$4];2;0)" office:value-type="float" office:value="1" calcext:value-type="float">
            <text:p>1</text:p>
          </table:table-cell>
          <table:table-cell office:value-type="string" calcext:value-type="string">
            <text:p>ハイケイ</text:p>
          </table:table-cell>
          <table:table-cell table:formula="of:=VLOOKUP([.K129];[$種類番号.$A$1:$種類番号.$B$4];2;0)" office:value-type="float" office:value="2" calcext:value-type="float">
            <text:p>2</text:p>
          </table:table-cell>
          <table:table-cell office:value-type="string" calcext:value-type="string">
            <text:p>黄</text:p>
          </table:table-cell>
          <table:table-cell table:formula="of:=VLOOKUP([.M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IF(ISNA([.$S129]);&quot;null&quot;;&quot;&quot;&quot;&quot;&amp;[.$S129]&amp;&quot;&quot;&quot;&quot;);[$JSON.$E$1];[.$U129];[$JSON.$F$1];IF(ISNA([.$W129]);&quot;null&quot;;&quot;&quot;&quot;&quot;&amp;[.$W129]&amp;&quot;&quot;&quot;&quot;);[$JSON.$G$1];[.$Y129];[$JSON.$H$1];[.$H129];[$JSON.$I$1];[.J129];[$JSON.$J$1];[.$L129];[$JSON.$K$1];[.$O129];[$JSON.$L$1];[.$N129];[$JSON.$M$1];[.$R129];[$JSON.$N$1];[.$T129];[$JSON.$O$1];IF(ISNA([.$V129]);&quot;null&quot;;[.$V129]);[$JSON.$P$1];[.$X129];[$JSON.$Q$1];[.$A129];[$JSON.$R$1];[.$B129];[$JSON.$S$1])" office:value-type="string" office:string-value="{&quot;id&quot;:&quot;Y-9&quot;,&quot;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orderTable&quot;:128,&quot;orderDeck&quot;:255}," calcext:value-type="string">
            <text:p>{"id":"Y-9","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G130];[$収録番号.$A$1:$収録番号.$B$9];2;0)" office:value-type="float" office:value="20" calcext:value-type="float">
            <text:p>20</text:p>
          </table:table-cell>
          <table:table-cell office:value-type="string" calcext:value-type="string">
            <text:p>N</text:p>
          </table:table-cell>
          <table:table-cell table:formula="of:=VLOOKUP([.I130];[$レアリティ番号.$A$1:$レアリティ番号.$B$4];2;0)" office:value-type="float" office:value="1" calcext:value-type="float">
            <text:p>1</text:p>
          </table:table-cell>
          <table:table-cell office:value-type="string" calcext:value-type="string">
            <text:p>ハイケイ</text:p>
          </table:table-cell>
          <table:table-cell table:formula="of:=VLOOKUP([.K130];[$種類番号.$A$1:$種類番号.$B$4];2;0)" office:value-type="float" office:value="2" calcext:value-type="float">
            <text:p>2</text:p>
          </table:table-cell>
          <table:table-cell office:value-type="string" calcext:value-type="string">
            <text:p>黄</text:p>
          </table:table-cell>
          <table:table-cell table:formula="of:=VLOOKUP([.M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IF(ISNA([.$S130]);&quot;null&quot;;&quot;&quot;&quot;&quot;&amp;[.$S130]&amp;&quot;&quot;&quot;&quot;);[$JSON.$E$1];[.$U130];[$JSON.$F$1];IF(ISNA([.$W130]);&quot;null&quot;;&quot;&quot;&quot;&quot;&amp;[.$W130]&amp;&quot;&quot;&quot;&quot;);[$JSON.$G$1];[.$Y130];[$JSON.$H$1];[.$H130];[$JSON.$I$1];[.J130];[$JSON.$J$1];[.$L130];[$JSON.$K$1];[.$O130];[$JSON.$L$1];[.$N130];[$JSON.$M$1];[.$R130];[$JSON.$N$1];[.$T130];[$JSON.$O$1];IF(ISNA([.$V130]);&quot;null&quot;;[.$V130]);[$JSON.$P$1];[.$X130];[$JSON.$Q$1];[.$A130];[$JSON.$R$1];[.$B130];[$JSON.$S$1])" office:value-type="string" office:string-value="{&quot;id&quot;:&quot;Y-10&quot;,&quot;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orderTable&quot;:129,&quot;orderDeck&quot;:245}," calcext:value-type="string">
            <text:p>{"id":"Y-10","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G131];[$収録番号.$A$1:$収録番号.$B$9];2;0)" office:value-type="float" office:value="20" calcext:value-type="float">
            <text:p>20</text:p>
          </table:table-cell>
          <table:table-cell office:value-type="string" calcext:value-type="string">
            <text:p>N</text:p>
          </table:table-cell>
          <table:table-cell table:formula="of:=VLOOKUP([.I131];[$レアリティ番号.$A$1:$レアリティ番号.$B$4];2;0)" office:value-type="float" office:value="1" calcext:value-type="float">
            <text:p>1</text:p>
          </table:table-cell>
          <table:table-cell office:value-type="string" calcext:value-type="string">
            <text:p>マホウ</text:p>
          </table:table-cell>
          <table:table-cell table:formula="of:=VLOOKUP([.K131];[$種類番号.$A$1:$種類番号.$B$4];2;0)" office:value-type="float" office:value="3" calcext:value-type="float">
            <text:p>3</text:p>
          </table:table-cell>
          <table:table-cell office:value-type="string" calcext:value-type="string">
            <text:p>黄</text:p>
          </table:table-cell>
          <table:table-cell table:formula="of:=VLOOKUP([.M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IF(ISNA([.$S131]);&quot;null&quot;;&quot;&quot;&quot;&quot;&amp;[.$S131]&amp;&quot;&quot;&quot;&quot;);[$JSON.$E$1];[.$U131];[$JSON.$F$1];IF(ISNA([.$W131]);&quot;null&quot;;&quot;&quot;&quot;&quot;&amp;[.$W131]&amp;&quot;&quot;&quot;&quot;);[$JSON.$G$1];[.$Y131];[$JSON.$H$1];[.$H131];[$JSON.$I$1];[.J131];[$JSON.$J$1];[.$L131];[$JSON.$K$1];[.$O131];[$JSON.$L$1];[.$N131];[$JSON.$M$1];[.$R131];[$JSON.$N$1];[.$T131];[$JSON.$O$1];IF(ISNA([.$V131]);&quot;null&quot;;[.$V131]);[$JSON.$P$1];[.$X131];[$JSON.$Q$1];[.$A131];[$JSON.$R$1];[.$B131];[$JSON.$S$1])" office:value-type="string" office:string-value="{&quot;id&quot;:&quot;Y-11&quot;,&quot;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orderTable&quot;:130,&quot;orderDeck&quot;:300}," calcext:value-type="string">
            <text:p>{"id":"Y-11","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G132];[$収録番号.$A$1:$収録番号.$B$9];2;0)" office:value-type="float" office:value="20" calcext:value-type="float">
            <text:p>20</text:p>
          </table:table-cell>
          <table:table-cell office:value-type="string" calcext:value-type="string">
            <text:p>N</text:p>
          </table:table-cell>
          <table:table-cell table:formula="of:=VLOOKUP([.I132];[$レアリティ番号.$A$1:$レアリティ番号.$B$4];2;0)" office:value-type="float" office:value="1" calcext:value-type="float">
            <text:p>1</text:p>
          </table:table-cell>
          <table:table-cell office:value-type="string" calcext:value-type="string">
            <text:p>マホウ</text:p>
          </table:table-cell>
          <table:table-cell table:formula="of:=VLOOKUP([.K132];[$種類番号.$A$1:$種類番号.$B$4];2;0)" office:value-type="float" office:value="3" calcext:value-type="float">
            <text:p>3</text:p>
          </table:table-cell>
          <table:table-cell office:value-type="string" calcext:value-type="string">
            <text:p>黄</text:p>
          </table:table-cell>
          <table:table-cell table:formula="of:=VLOOKUP([.M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IF(ISNA([.$S132]);&quot;null&quot;;&quot;&quot;&quot;&quot;&amp;[.$S132]&amp;&quot;&quot;&quot;&quot;);[$JSON.$E$1];[.$U132];[$JSON.$F$1];IF(ISNA([.$W132]);&quot;null&quot;;&quot;&quot;&quot;&quot;&amp;[.$W132]&amp;&quot;&quot;&quot;&quot;);[$JSON.$G$1];[.$Y132];[$JSON.$H$1];[.$H132];[$JSON.$I$1];[.J132];[$JSON.$J$1];[.$L132];[$JSON.$K$1];[.$O132];[$JSON.$L$1];[.$N132];[$JSON.$M$1];[.$R132];[$JSON.$N$1];[.$T132];[$JSON.$O$1];IF(ISNA([.$V132]);&quot;null&quot;;[.$V132]);[$JSON.$P$1];[.$X132];[$JSON.$Q$1];[.$A132];[$JSON.$R$1];[.$B132];[$JSON.$S$1])" office:value-type="string" office:string-value="{&quot;id&quot;:&quot;Y-12&quot;,&quot;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orderTable&quot;:131,&quot;orderDeck&quot;:285}," calcext:value-type="string">
            <text:p>{"id":"Y-12","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G133];[$収録番号.$A$1:$収録番号.$B$9];2;0)" office:value-type="float" office:value="20" calcext:value-type="float">
            <text:p>20</text:p>
          </table:table-cell>
          <table:table-cell office:value-type="string" calcext:value-type="string">
            <text:p>N</text:p>
          </table:table-cell>
          <table:table-cell table:formula="of:=VLOOKUP([.I133];[$レアリティ番号.$A$1:$レアリティ番号.$B$4];2;0)" office:value-type="float" office:value="1" calcext:value-type="float">
            <text:p>1</text:p>
          </table:table-cell>
          <table:table-cell office:value-type="string" calcext:value-type="string">
            <text:p>マリョク</text:p>
          </table:table-cell>
          <table:table-cell table:formula="of:=VLOOKUP([.K133];[$種類番号.$A$1:$種類番号.$B$4];2;0)" office:value-type="float" office:value="4" calcext:value-type="float">
            <text:p>4</text:p>
          </table:table-cell>
          <table:table-cell office:value-type="string" calcext:value-type="string">
            <text:p>黄</text:p>
          </table:table-cell>
          <table:table-cell table:formula="of:=VLOOKUP([.M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3];[$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IF(ISNA([.$S133]);&quot;null&quot;;&quot;&quot;&quot;&quot;&amp;[.$S133]&amp;&quot;&quot;&quot;&quot;);[$JSON.$E$1];[.$U133];[$JSON.$F$1];IF(ISNA([.$W133]);&quot;null&quot;;&quot;&quot;&quot;&quot;&amp;[.$W133]&amp;&quot;&quot;&quot;&quot;);[$JSON.$G$1];[.$Y133];[$JSON.$H$1];[.$H133];[$JSON.$I$1];[.J133];[$JSON.$J$1];[.$L133];[$JSON.$K$1];[.$O133];[$JSON.$L$1];[.$N133];[$JSON.$M$1];[.$R133];[$JSON.$N$1];[.$T133];[$JSON.$O$1];IF(ISNA([.$V133]);&quot;null&quot;;[.$V133]);[$JSON.$P$1];[.$X133];[$JSON.$Q$1];[.$A133];[$JSON.$R$1];[.$B133];[$JSON.$S$1])" office:value-type="string" office:string-value="{&quot;id&quot;:&quot;Y-13&quot;,&quot;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orderTable&quot;:132,&quot;orderDeck&quot;:361}," calcext:value-type="string">
            <text:p>{"id":"Y-13","name":"イエローストーン","kana":"いえろーすとーん","traitText":null,"ruleText":"※デッキに何枚でも入れてよい。","legacyText":"復元","imageUrl":"https://one-draw.jp/ijinden/cardlist/Y01/card/02_Y_013.png","expansion":20,"rarity":1,"type":4,"level":1,"color":8,"term":0,"trait":0,"power":null,"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G134];[$収録番号.$A$1:$収録番号.$B$9];2;0)" office:value-type="float" office:value="25" calcext:value-type="float">
            <text:p>25</text:p>
          </table:table-cell>
          <table:table-cell office:value-type="string" calcext:value-type="string">
            <text:p>SR</text:p>
          </table:table-cell>
          <table:table-cell table:formula="of:=VLOOKUP([.I134];[$レアリティ番号.$A$1:$レアリティ番号.$B$4];2;0)" office:value-type="float" office:value="4" calcext:value-type="float">
            <text:p>4</text:p>
          </table:table-cell>
          <table:table-cell office:value-type="string" calcext:value-type="string">
            <text:p>イジン</text:p>
          </table:table-cell>
          <table:table-cell table:formula="of:=VLOOKUP([.K134];[$種類番号.$A$1:$種類番号.$B$4];2;0)" office:value-type="float" office:value="1" calcext:value-type="float">
            <text:p>1</text:p>
          </table:table-cell>
          <table:table-cell office:value-type="string" calcext:value-type="string">
            <text:p>赤</text:p>
          </table:table-cell>
          <table:table-cell table:formula="of:=VLOOKUP([.M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34];[$能力語番号.$A$1:$能力語番号.$B$10];2;0);0)" office:value-type="float" office:value="4" calcext:value-type="float">
            <text:p>4</text:p>
          </table:table-cell>
          <table:table-cell office:value-type="string" calcext:value-type="string">
            <text:p>剣術</text:p>
          </table:table-cell>
          <table:table-cell table:formula="of:=IFERROR(VLOOKUP([.$S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office:value-type="float" office:value="3000" calcext:value-type="float">
            <text:p>3000</text:p>
          </table:table-cell>
          <table:table-cell table:style-name="ce8" office:value-type="string" calcext:value-type="string">
            <text:p>反魂</text:p>
          </table:table-cell>
          <table:table-cell table:formula="of:=IFERROR(VLOOKUP([.$W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IF(ISNA([.$S134]);&quot;null&quot;;&quot;&quot;&quot;&quot;&amp;[.$S134]&amp;&quot;&quot;&quot;&quot;);[$JSON.$E$1];[.$U134];[$JSON.$F$1];IF(ISNA([.$W134]);&quot;null&quot;;&quot;&quot;&quot;&quot;&amp;[.$W134]&amp;&quot;&quot;&quot;&quot;);[$JSON.$G$1];[.$Y134];[$JSON.$H$1];[.$H134];[$JSON.$I$1];[.J134];[$JSON.$J$1];[.$L134];[$JSON.$K$1];[.$O134];[$JSON.$L$1];[.$N134];[$JSON.$M$1];[.$R134];[$JSON.$N$1];[.$T134];[$JSON.$O$1];IF(ISNA([.$V134]);&quot;null&quot;;[.$V134]);[$JSON.$P$1];[.$X134];[$JSON.$Q$1];[.$A134];[$JSON.$R$1];[.$B134];[$JSON.$S$1])" office:value-type="string" office:string-value="{&quot;id&quot;:&quot;2-1&quot;,&quot;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orderTable&quot;:133,&quot;orderDeck&quot;:69}," calcext:value-type="string">
            <text:p>{"id":"2-1","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G135];[$収録番号.$A$1:$収録番号.$B$9];2;0)" office:value-type="float" office:value="25" calcext:value-type="float">
            <text:p>25</text:p>
          </table:table-cell>
          <table:table-cell office:value-type="string" calcext:value-type="string">
            <text:p>SR</text:p>
          </table:table-cell>
          <table:table-cell table:formula="of:=VLOOKUP([.I135];[$レアリティ番号.$A$1:$レアリティ番号.$B$4];2;0)" office:value-type="float" office:value="4" calcext:value-type="float">
            <text:p>4</text:p>
          </table:table-cell>
          <table:table-cell office:value-type="string" calcext:value-type="string">
            <text:p>イジン</text:p>
          </table:table-cell>
          <table:table-cell table:formula="of:=VLOOKUP([.K135];[$種類番号.$A$1:$種類番号.$B$4];2;0)" office:value-type="float" office:value="1" calcext:value-type="float">
            <text:p>1</text:p>
          </table:table-cell>
          <table:table-cell office:value-type="string" calcext:value-type="string">
            <text:p>青</text:p>
          </table:table-cell>
          <table:table-cell table:formula="of:=VLOOKUP([.M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IF(ISNA([.$S135]);&quot;null&quot;;&quot;&quot;&quot;&quot;&amp;[.$S135]&amp;&quot;&quot;&quot;&quot;);[$JSON.$E$1];[.$U135];[$JSON.$F$1];IF(ISNA([.$W135]);&quot;null&quot;;&quot;&quot;&quot;&quot;&amp;[.$W135]&amp;&quot;&quot;&quot;&quot;);[$JSON.$G$1];[.$Y135];[$JSON.$H$1];[.$H135];[$JSON.$I$1];[.J135];[$JSON.$J$1];[.$L135];[$JSON.$K$1];[.$O135];[$JSON.$L$1];[.$N135];[$JSON.$M$1];[.$R135];[$JSON.$N$1];[.$T135];[$JSON.$O$1];IF(ISNA([.$V135]);&quot;null&quot;;[.$V135]);[$JSON.$P$1];[.$X135];[$JSON.$Q$1];[.$A135];[$JSON.$R$1];[.$B135];[$JSON.$S$1])" office:value-type="string" office:string-value="{&quot;id&quot;:&quot;2-2&quot;,&quot;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orderTable&quot;:134,&quot;orderDeck&quot;:158}," calcext:value-type="string">
            <text:p>{"id":"2-2","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G136];[$収録番号.$A$1:$収録番号.$B$9];2;0)" office:value-type="float" office:value="25" calcext:value-type="float">
            <text:p>25</text:p>
          </table:table-cell>
          <table:table-cell office:value-type="string" calcext:value-type="string">
            <text:p>SR</text:p>
          </table:table-cell>
          <table:table-cell table:formula="of:=VLOOKUP([.I136];[$レアリティ番号.$A$1:$レアリティ番号.$B$4];2;0)" office:value-type="float" office:value="4" calcext:value-type="float">
            <text:p>4</text:p>
          </table:table-cell>
          <table:table-cell office:value-type="string" calcext:value-type="string">
            <text:p>イジン</text:p>
          </table:table-cell>
          <table:table-cell table:formula="of:=VLOOKUP([.K136];[$種類番号.$A$1:$種類番号.$B$4];2;0)" office:value-type="float" office:value="1" calcext:value-type="float">
            <text:p>1</text:p>
          </table:table-cell>
          <table:table-cell office:value-type="string" calcext:value-type="string">
            <text:p>緑</text:p>
          </table:table-cell>
          <table:table-cell table:formula="of:=VLOOKUP([.M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office:value-type="float" office:value="8000" calcext:value-type="float">
            <text:p>8000</text:p>
          </table:table-cell>
          <table:table-cell table:style-name="ce8" office:value-type="string" calcext:value-type="string">
            <text:p>魔力化</text:p>
          </table:table-cell>
          <table:table-cell table:formula="of:=IFERROR(VLOOKUP([.$W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IF(ISNA([.$S136]);&quot;null&quot;;&quot;&quot;&quot;&quot;&amp;[.$S136]&amp;&quot;&quot;&quot;&quot;);[$JSON.$E$1];[.$U136];[$JSON.$F$1];IF(ISNA([.$W136]);&quot;null&quot;;&quot;&quot;&quot;&quot;&amp;[.$W136]&amp;&quot;&quot;&quot;&quot;);[$JSON.$G$1];[.$Y136];[$JSON.$H$1];[.$H136];[$JSON.$I$1];[.J136];[$JSON.$J$1];[.$L136];[$JSON.$K$1];[.$O136];[$JSON.$L$1];[.$N136];[$JSON.$M$1];[.$R136];[$JSON.$N$1];[.$T136];[$JSON.$O$1];IF(ISNA([.$V136]);&quot;null&quot;;[.$V136]);[$JSON.$P$1];[.$X136];[$JSON.$Q$1];[.$A136];[$JSON.$R$1];[.$B136];[$JSON.$S$1])" office:value-type="string" office:string-value="{&quot;id&quot;:&quot;2-3&quot;,&quot;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orderTable&quot;:135,&quot;orderDeck&quot;:230}," calcext:value-type="string">
            <text:p>{"id":"2-3","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G137];[$収録番号.$A$1:$収録番号.$B$9];2;0)" office:value-type="float" office:value="25" calcext:value-type="float">
            <text:p>25</text:p>
          </table:table-cell>
          <table:table-cell office:value-type="string" calcext:value-type="string">
            <text:p>SR</text:p>
          </table:table-cell>
          <table:table-cell table:formula="of:=VLOOKUP([.I137];[$レアリティ番号.$A$1:$レアリティ番号.$B$4];2;0)" office:value-type="float" office:value="4" calcext:value-type="float">
            <text:p>4</text:p>
          </table:table-cell>
          <table:table-cell office:value-type="string" calcext:value-type="string">
            <text:p>イジン</text:p>
          </table:table-cell>
          <table:table-cell table:formula="of:=VLOOKUP([.K137];[$種類番号.$A$1:$種類番号.$B$4];2;0)" office:value-type="float" office:value="1" calcext:value-type="float">
            <text:p>1</text:p>
          </table:table-cell>
          <table:table-cell office:value-type="string" calcext:value-type="string">
            <text:p>黄</text:p>
          </table:table-cell>
          <table:table-cell table:formula="of:=VLOOKUP([.M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office:value-type="float" office:value="4000" calcext:value-type="float">
            <text:p>4000</text:p>
          </table:table-cell>
          <table:table-cell table:style-name="ce8" office:value-type="string" calcext:value-type="string">
            <text:p>魔力化</text:p>
          </table:table-cell>
          <table:table-cell table:formula="of:=IFERROR(VLOOKUP([.$W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IF(ISNA([.$S137]);&quot;null&quot;;&quot;&quot;&quot;&quot;&amp;[.$S137]&amp;&quot;&quot;&quot;&quot;);[$JSON.$E$1];[.$U137];[$JSON.$F$1];IF(ISNA([.$W137]);&quot;null&quot;;&quot;&quot;&quot;&quot;&amp;[.$W137]&amp;&quot;&quot;&quot;&quot;);[$JSON.$G$1];[.$Y137];[$JSON.$H$1];[.$H137];[$JSON.$I$1];[.J137];[$JSON.$J$1];[.$L137];[$JSON.$K$1];[.$O137];[$JSON.$L$1];[.$N137];[$JSON.$M$1];[.$R137];[$JSON.$N$1];[.$T137];[$JSON.$O$1];IF(ISNA([.$V137]);&quot;null&quot;;[.$V137]);[$JSON.$P$1];[.$X137];[$JSON.$Q$1];[.$A137];[$JSON.$R$1];[.$B137];[$JSON.$S$1])" office:value-type="string" office:string-value="{&quot;id&quot;:&quot;2-4&quot;,&quot;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orderTable&quot;:136,&quot;orderDeck&quot;:224}," calcext:value-type="string">
            <text:p>{"id":"2-4","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G138];[$収録番号.$A$1:$収録番号.$B$9];2;0)" office:value-type="float" office:value="25" calcext:value-type="float">
            <text:p>25</text:p>
          </table:table-cell>
          <table:table-cell office:value-type="string" calcext:value-type="string">
            <text:p>SR</text:p>
          </table:table-cell>
          <table:table-cell table:formula="of:=VLOOKUP([.I138];[$レアリティ番号.$A$1:$レアリティ番号.$B$4];2;0)" office:value-type="float" office:value="4" calcext:value-type="float">
            <text:p>4</text:p>
          </table:table-cell>
          <table:table-cell office:value-type="string" calcext:value-type="string">
            <text:p>イジン</text:p>
          </table:table-cell>
          <table:table-cell table:formula="of:=VLOOKUP([.K138];[$種類番号.$A$1:$種類番号.$B$4];2;0)" office:value-type="float" office:value="1" calcext:value-type="float">
            <text:p>1</text:p>
          </table:table-cell>
          <table:table-cell office:value-type="string" calcext:value-type="string">
            <text:p>黄</text:p>
          </table:table-cell>
          <table:table-cell table:formula="of:=VLOOKUP([.M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office:value-type="float" office:value="2000" calcext:value-type="float">
            <text:p>2000</text:p>
          </table:table-cell>
          <table:table-cell table:style-name="ce8" office:value-type="string" calcext:value-type="string">
            <text:p>山札の上か下に戻す</text:p>
          </table:table-cell>
          <table:table-cell table:formula="of:=IFERROR(VLOOKUP([.$W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IF(ISNA([.$S138]);&quot;null&quot;;&quot;&quot;&quot;&quot;&amp;[.$S138]&amp;&quot;&quot;&quot;&quot;);[$JSON.$E$1];[.$U138];[$JSON.$F$1];IF(ISNA([.$W138]);&quot;null&quot;;&quot;&quot;&quot;&quot;&amp;[.$W138]&amp;&quot;&quot;&quot;&quot;);[$JSON.$G$1];[.$Y138];[$JSON.$H$1];[.$H138];[$JSON.$I$1];[.J138];[$JSON.$J$1];[.$L138];[$JSON.$K$1];[.$O138];[$JSON.$L$1];[.$N138];[$JSON.$M$1];[.$R138];[$JSON.$N$1];[.$T138];[$JSON.$O$1];IF(ISNA([.$V138]);&quot;null&quot;;[.$V138]);[$JSON.$P$1];[.$X138];[$JSON.$Q$1];[.$A138];[$JSON.$R$1];[.$B138];[$JSON.$S$1])" office:value-type="string" office:string-value="{&quot;id&quot;:&quot;2-5&quot;,&quot;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orderTable&quot;:137,&quot;orderDeck&quot;:133}," calcext:value-type="string">
            <text:p>{"id":"2-5","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G139];[$収録番号.$A$1:$収録番号.$B$9];2;0)" office:value-type="float" office:value="25" calcext:value-type="float">
            <text:p>25</text:p>
          </table:table-cell>
          <table:table-cell office:value-type="string" calcext:value-type="string">
            <text:p>SR</text:p>
          </table:table-cell>
          <table:table-cell table:formula="of:=VLOOKUP([.I139];[$レアリティ番号.$A$1:$レアリティ番号.$B$4];2;0)" office:value-type="float" office:value="4" calcext:value-type="float">
            <text:p>4</text:p>
          </table:table-cell>
          <table:table-cell office:value-type="string" calcext:value-type="string">
            <text:p>イジン</text:p>
          </table:table-cell>
          <table:table-cell table:formula="of:=VLOOKUP([.K139];[$種類番号.$A$1:$種類番号.$B$4];2;0)" office:value-type="float" office:value="1" calcext:value-type="float">
            <text:p>1</text:p>
          </table:table-cell>
          <table:table-cell office:value-type="string" calcext:value-type="string">
            <text:p>黄</text:p>
          </table:table-cell>
          <table:table-cell table:formula="of:=VLOOKUP([.M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IF(ISNA([.$S139]);&quot;null&quot;;&quot;&quot;&quot;&quot;&amp;[.$S139]&amp;&quot;&quot;&quot;&quot;);[$JSON.$E$1];[.$U139];[$JSON.$F$1];IF(ISNA([.$W139]);&quot;null&quot;;&quot;&quot;&quot;&quot;&amp;[.$W139]&amp;&quot;&quot;&quot;&quot;);[$JSON.$G$1];[.$Y139];[$JSON.$H$1];[.$H139];[$JSON.$I$1];[.J139];[$JSON.$J$1];[.$L139];[$JSON.$K$1];[.$O139];[$JSON.$L$1];[.$N139];[$JSON.$M$1];[.$R139];[$JSON.$N$1];[.$T139];[$JSON.$O$1];IF(ISNA([.$V139]);&quot;null&quot;;[.$V139]);[$JSON.$P$1];[.$X139];[$JSON.$Q$1];[.$A139];[$JSON.$R$1];[.$B139];[$JSON.$S$1])" office:value-type="string" office:string-value="{&quot;id&quot;:&quot;2-6&quot;,&quot;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orderTable&quot;:138,&quot;orderDeck&quot;:214}," calcext:value-type="string">
            <text:p>{"id":"2-6","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G140];[$収録番号.$A$1:$収録番号.$B$9];2;0)" office:value-type="float" office:value="25" calcext:value-type="float">
            <text:p>25</text:p>
          </table:table-cell>
          <table:table-cell office:value-type="string" calcext:value-type="string">
            <text:p>R</text:p>
          </table:table-cell>
          <table:table-cell table:formula="of:=VLOOKUP([.I140];[$レアリティ番号.$A$1:$レアリティ番号.$B$4];2;0)" office:value-type="float" office:value="2" calcext:value-type="float">
            <text:p>2</text:p>
          </table:table-cell>
          <table:table-cell office:value-type="string" calcext:value-type="string">
            <text:p>イジン</text:p>
          </table:table-cell>
          <table:table-cell table:formula="of:=VLOOKUP([.K140];[$種類番号.$A$1:$種類番号.$B$4];2;0)" office:value-type="float" office:value="1" calcext:value-type="float">
            <text:p>1</text:p>
          </table:table-cell>
          <table:table-cell office:value-type="string" calcext:value-type="string">
            <text:p>赤</text:p>
          </table:table-cell>
          <table:table-cell table:formula="of:=VLOOKUP([.M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office:value-type="float" office:value="500" calcext:value-type="float">
            <text:p>500</text:p>
          </table:table-cell>
          <table:table-cell table:style-name="ce8" office:value-type="string" calcext:value-type="string">
            <text:p>反魂</text:p>
          </table:table-cell>
          <table:table-cell table:formula="of:=IFERROR(VLOOKUP([.$W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IF(ISNA([.$S140]);&quot;null&quot;;&quot;&quot;&quot;&quot;&amp;[.$S140]&amp;&quot;&quot;&quot;&quot;);[$JSON.$E$1];[.$U140];[$JSON.$F$1];IF(ISNA([.$W140]);&quot;null&quot;;&quot;&quot;&quot;&quot;&amp;[.$W140]&amp;&quot;&quot;&quot;&quot;);[$JSON.$G$1];[.$Y140];[$JSON.$H$1];[.$H140];[$JSON.$I$1];[.J140];[$JSON.$J$1];[.$L140];[$JSON.$K$1];[.$O140];[$JSON.$L$1];[.$N140];[$JSON.$M$1];[.$R140];[$JSON.$N$1];[.$T140];[$JSON.$O$1];IF(ISNA([.$V140]);&quot;null&quot;;[.$V140]);[$JSON.$P$1];[.$X140];[$JSON.$Q$1];[.$A140];[$JSON.$R$1];[.$B140];[$JSON.$S$1])" office:value-type="string" office:string-value="{&quot;id&quot;:&quot;2-7&quot;,&quot;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orderTable&quot;:139,&quot;orderDeck&quot;:28}," calcext:value-type="string">
            <text:p>{"id":"2-7","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G141];[$収録番号.$A$1:$収録番号.$B$9];2;0)" office:value-type="float" office:value="25" calcext:value-type="float">
            <text:p>25</text:p>
          </table:table-cell>
          <table:table-cell office:value-type="string" calcext:value-type="string">
            <text:p>R</text:p>
          </table:table-cell>
          <table:table-cell table:formula="of:=VLOOKUP([.I141];[$レアリティ番号.$A$1:$レアリティ番号.$B$4];2;0)" office:value-type="float" office:value="2" calcext:value-type="float">
            <text:p>2</text:p>
          </table:table-cell>
          <table:table-cell office:value-type="string" calcext:value-type="string">
            <text:p>イジン</text:p>
          </table:table-cell>
          <table:table-cell table:formula="of:=VLOOKUP([.K141];[$種類番号.$A$1:$種類番号.$B$4];2;0)" office:value-type="float" office:value="1" calcext:value-type="float">
            <text:p>1</text:p>
          </table:table-cell>
          <table:table-cell office:value-type="string" calcext:value-type="string">
            <text:p>赤</text:p>
          </table:table-cell>
          <table:table-cell table:formula="of:=VLOOKUP([.M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office:value-type="float" office:value="10000" calcext:value-type="float">
            <text:p>10000</text:p>
          </table:table-cell>
          <table:table-cell table:style-name="ce8" table:formula="of:=NA()" office:value-type="string" office:string-value="" calcext:value-type="error">
            <text:p>#N/A</text:p>
          </table:table-cell>
          <table:table-cell table:formula="of:=IFERROR(VLOOKUP([.$W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IF(ISNA([.$S141]);&quot;null&quot;;&quot;&quot;&quot;&quot;&amp;[.$S141]&amp;&quot;&quot;&quot;&quot;);[$JSON.$E$1];[.$U141];[$JSON.$F$1];IF(ISNA([.$W141]);&quot;null&quot;;&quot;&quot;&quot;&quot;&amp;[.$W141]&amp;&quot;&quot;&quot;&quot;);[$JSON.$G$1];[.$Y141];[$JSON.$H$1];[.$H141];[$JSON.$I$1];[.J141];[$JSON.$J$1];[.$L141];[$JSON.$K$1];[.$O141];[$JSON.$L$1];[.$N141];[$JSON.$M$1];[.$R141];[$JSON.$N$1];[.$T141];[$JSON.$O$1];IF(ISNA([.$V141]);&quot;null&quot;;[.$V141]);[$JSON.$P$1];[.$X141];[$JSON.$Q$1];[.$A141];[$JSON.$R$1];[.$B141];[$JSON.$S$1])" office:value-type="string" office:string-value="{&quot;id&quot;:&quot;2-8&quot;,&quot;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orderTable&quot;:140,&quot;orderDeck&quot;:234}," calcext:value-type="string">
            <text:p>{"id":"2-8","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G142];[$収録番号.$A$1:$収録番号.$B$9];2;0)" office:value-type="float" office:value="25" calcext:value-type="float">
            <text:p>25</text:p>
          </table:table-cell>
          <table:table-cell office:value-type="string" calcext:value-type="string">
            <text:p>N</text:p>
          </table:table-cell>
          <table:table-cell table:formula="of:=VLOOKUP([.I142];[$レアリティ番号.$A$1:$レアリティ番号.$B$4];2;0)" office:value-type="float" office:value="1" calcext:value-type="float">
            <text:p>1</text:p>
          </table:table-cell>
          <table:table-cell office:value-type="string" calcext:value-type="string">
            <text:p>イジン</text:p>
          </table:table-cell>
          <table:table-cell table:formula="of:=VLOOKUP([.K142];[$種類番号.$A$1:$種類番号.$B$4];2;0)" office:value-type="float" office:value="1" calcext:value-type="float">
            <text:p>1</text:p>
          </table:table-cell>
          <table:table-cell office:value-type="string" calcext:value-type="string">
            <text:p>赤</text:p>
          </table:table-cell>
          <table:table-cell table:formula="of:=VLOOKUP([.M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office:value-type="float" office:value="3000" calcext:value-type="float">
            <text:p>3000</text:p>
          </table:table-cell>
          <table:table-cell table:style-name="ce8" office:value-type="string" calcext:value-type="string">
            <text:p>魔力化</text:p>
          </table:table-cell>
          <table:table-cell table:formula="of:=IFERROR(VLOOKUP([.$W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IF(ISNA([.$S142]);&quot;null&quot;;&quot;&quot;&quot;&quot;&amp;[.$S142]&amp;&quot;&quot;&quot;&quot;);[$JSON.$E$1];[.$U142];[$JSON.$F$1];IF(ISNA([.$W142]);&quot;null&quot;;&quot;&quot;&quot;&quot;&amp;[.$W142]&amp;&quot;&quot;&quot;&quot;);[$JSON.$G$1];[.$Y142];[$JSON.$H$1];[.$H142];[$JSON.$I$1];[.J142];[$JSON.$J$1];[.$L142];[$JSON.$K$1];[.$O142];[$JSON.$L$1];[.$N142];[$JSON.$M$1];[.$R142];[$JSON.$N$1];[.$T142];[$JSON.$O$1];IF(ISNA([.$V142]);&quot;null&quot;;[.$V142]);[$JSON.$P$1];[.$X142];[$JSON.$Q$1];[.$A142];[$JSON.$R$1];[.$B142];[$JSON.$S$1])" office:value-type="string" office:string-value="{&quot;id&quot;:&quot;2-9&quot;,&quot;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orderTable&quot;:141,&quot;orderDeck&quot;:148}," calcext:value-type="string">
            <text:p>{"id":"2-9","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G143];[$収録番号.$A$1:$収録番号.$B$9];2;0)" office:value-type="float" office:value="25" calcext:value-type="float">
            <text:p>25</text:p>
          </table:table-cell>
          <table:table-cell office:value-type="string" calcext:value-type="string">
            <text:p>N</text:p>
          </table:table-cell>
          <table:table-cell table:formula="of:=VLOOKUP([.I143];[$レアリティ番号.$A$1:$レアリティ番号.$B$4];2;0)" office:value-type="float" office:value="1" calcext:value-type="float">
            <text:p>1</text:p>
          </table:table-cell>
          <table:table-cell office:value-type="string" calcext:value-type="string">
            <text:p>イジン</text:p>
          </table:table-cell>
          <table:table-cell table:formula="of:=VLOOKUP([.K143];[$種類番号.$A$1:$種類番号.$B$4];2;0)" office:value-type="float" office:value="1" calcext:value-type="float">
            <text:p>1</text:p>
          </table:table-cell>
          <table:table-cell office:value-type="string" calcext:value-type="string">
            <text:p>赤</text:p>
          </table:table-cell>
          <table:table-cell table:formula="of:=VLOOKUP([.M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IF(ISNA([.$S143]);&quot;null&quot;;&quot;&quot;&quot;&quot;&amp;[.$S143]&amp;&quot;&quot;&quot;&quot;);[$JSON.$E$1];[.$U143];[$JSON.$F$1];IF(ISNA([.$W143]);&quot;null&quot;;&quot;&quot;&quot;&quot;&amp;[.$W143]&amp;&quot;&quot;&quot;&quot;);[$JSON.$G$1];[.$Y143];[$JSON.$H$1];[.$H143];[$JSON.$I$1];[.J143];[$JSON.$J$1];[.$L143];[$JSON.$K$1];[.$O143];[$JSON.$L$1];[.$N143];[$JSON.$M$1];[.$R143];[$JSON.$N$1];[.$T143];[$JSON.$O$1];IF(ISNA([.$V143]);&quot;null&quot;;[.$V143]);[$JSON.$P$1];[.$X143];[$JSON.$Q$1];[.$A143];[$JSON.$R$1];[.$B143];[$JSON.$S$1])" office:value-type="string" office:string-value="{&quot;id&quot;:&quot;2-10&quot;,&quot;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orderTable&quot;:142,&quot;orderDeck&quot;:4}," calcext:value-type="string">
            <text:p>{"id":"2-10","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G144];[$収録番号.$A$1:$収録番号.$B$9];2;0)" office:value-type="float" office:value="25" calcext:value-type="float">
            <text:p>25</text:p>
          </table:table-cell>
          <table:table-cell office:value-type="string" calcext:value-type="string">
            <text:p>N</text:p>
          </table:table-cell>
          <table:table-cell table:formula="of:=VLOOKUP([.I144];[$レアリティ番号.$A$1:$レアリティ番号.$B$4];2;0)" office:value-type="float" office:value="1" calcext:value-type="float">
            <text:p>1</text:p>
          </table:table-cell>
          <table:table-cell office:value-type="string" calcext:value-type="string">
            <text:p>イジン</text:p>
          </table:table-cell>
          <table:table-cell table:formula="of:=VLOOKUP([.K144];[$種類番号.$A$1:$種類番号.$B$4];2;0)" office:value-type="float" office:value="1" calcext:value-type="float">
            <text:p>1</text:p>
          </table:table-cell>
          <table:table-cell office:value-type="string" calcext:value-type="string">
            <text:p>赤</text:p>
          </table:table-cell>
          <table:table-cell table:formula="of:=VLOOKUP([.M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IF(ISNA([.$S144]);&quot;null&quot;;&quot;&quot;&quot;&quot;&amp;[.$S144]&amp;&quot;&quot;&quot;&quot;);[$JSON.$E$1];[.$U144];[$JSON.$F$1];IF(ISNA([.$W144]);&quot;null&quot;;&quot;&quot;&quot;&quot;&amp;[.$W144]&amp;&quot;&quot;&quot;&quot;);[$JSON.$G$1];[.$Y144];[$JSON.$H$1];[.$H144];[$JSON.$I$1];[.J144];[$JSON.$J$1];[.$L144];[$JSON.$K$1];[.$O144];[$JSON.$L$1];[.$N144];[$JSON.$M$1];[.$R144];[$JSON.$N$1];[.$T144];[$JSON.$O$1];IF(ISNA([.$V144]);&quot;null&quot;;[.$V144]);[$JSON.$P$1];[.$X144];[$JSON.$Q$1];[.$A144];[$JSON.$R$1];[.$B144];[$JSON.$S$1])" office:value-type="string" office:string-value="{&quot;id&quot;:&quot;2-11&quot;,&quot;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orderTable&quot;:143,&quot;orderDeck&quot;:70}," calcext:value-type="string">
            <text:p>{"id":"2-11","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G145];[$収録番号.$A$1:$収録番号.$B$9];2;0)" office:value-type="float" office:value="25" calcext:value-type="float">
            <text:p>25</text:p>
          </table:table-cell>
          <table:table-cell office:value-type="string" calcext:value-type="string">
            <text:p>N</text:p>
          </table:table-cell>
          <table:table-cell table:formula="of:=VLOOKUP([.I145];[$レアリティ番号.$A$1:$レアリティ番号.$B$4];2;0)" office:value-type="float" office:value="1" calcext:value-type="float">
            <text:p>1</text:p>
          </table:table-cell>
          <table:table-cell office:value-type="string" calcext:value-type="string">
            <text:p>イジン</text:p>
          </table:table-cell>
          <table:table-cell table:formula="of:=VLOOKUP([.K145];[$種類番号.$A$1:$種類番号.$B$4];2;0)" office:value-type="float" office:value="1" calcext:value-type="float">
            <text:p>1</text:p>
          </table:table-cell>
          <table:table-cell office:value-type="string" calcext:value-type="string">
            <text:p>赤</text:p>
          </table:table-cell>
          <table:table-cell table:formula="of:=VLOOKUP([.M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office:value-type="float" office:value="1000" calcext:value-type="float">
            <text:p>1000</text:p>
          </table:table-cell>
          <table:table-cell table:style-name="ce8" office:value-type="string" calcext:value-type="string">
            <text:p>魔力化</text:p>
          </table:table-cell>
          <table:table-cell table:formula="of:=IFERROR(VLOOKUP([.$W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IF(ISNA([.$S145]);&quot;null&quot;;&quot;&quot;&quot;&quot;&amp;[.$S145]&amp;&quot;&quot;&quot;&quot;);[$JSON.$E$1];[.$U145];[$JSON.$F$1];IF(ISNA([.$W145]);&quot;null&quot;;&quot;&quot;&quot;&quot;&amp;[.$W145]&amp;&quot;&quot;&quot;&quot;);[$JSON.$G$1];[.$Y145];[$JSON.$H$1];[.$H145];[$JSON.$I$1];[.J145];[$JSON.$J$1];[.$L145];[$JSON.$K$1];[.$O145];[$JSON.$L$1];[.$N145];[$JSON.$M$1];[.$R145];[$JSON.$N$1];[.$T145];[$JSON.$O$1];IF(ISNA([.$V145]);&quot;null&quot;;[.$V145]);[$JSON.$P$1];[.$X145];[$JSON.$Q$1];[.$A145];[$JSON.$R$1];[.$B145];[$JSON.$S$1])" office:value-type="string" office:string-value="{&quot;id&quot;:&quot;2-12&quot;,&quot;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orderTable&quot;:144,&quot;orderDeck&quot;:229}," calcext:value-type="string">
            <text:p>{"id":"2-12","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G146];[$収録番号.$A$1:$収録番号.$B$9];2;0)" office:value-type="float" office:value="25" calcext:value-type="float">
            <text:p>25</text:p>
          </table:table-cell>
          <table:table-cell office:value-type="string" calcext:value-type="string">
            <text:p>N</text:p>
          </table:table-cell>
          <table:table-cell table:formula="of:=VLOOKUP([.I146];[$レアリティ番号.$A$1:$レアリティ番号.$B$4];2;0)" office:value-type="float" office:value="1" calcext:value-type="float">
            <text:p>1</text:p>
          </table:table-cell>
          <table:table-cell office:value-type="string" calcext:value-type="string">
            <text:p>イジン</text:p>
          </table:table-cell>
          <table:table-cell table:formula="of:=VLOOKUP([.K146];[$種類番号.$A$1:$種類番号.$B$4];2;0)" office:value-type="float" office:value="1" calcext:value-type="float">
            <text:p>1</text:p>
          </table:table-cell>
          <table:table-cell office:value-type="string" calcext:value-type="string">
            <text:p>赤</text:p>
          </table:table-cell>
          <table:table-cell table:formula="of:=VLOOKUP([.M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office:value-type="float" office:value="7000" calcext:value-type="float">
            <text:p>7000</text:p>
          </table:table-cell>
          <table:table-cell table:style-name="ce8" table:formula="of:=NA()" office:value-type="string" office:string-value="" calcext:value-type="error">
            <text:p>#N/A</text:p>
          </table:table-cell>
          <table:table-cell table:formula="of:=IFERROR(VLOOKUP([.$W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IF(ISNA([.$S146]);&quot;null&quot;;&quot;&quot;&quot;&quot;&amp;[.$S146]&amp;&quot;&quot;&quot;&quot;);[$JSON.$E$1];[.$U146];[$JSON.$F$1];IF(ISNA([.$W146]);&quot;null&quot;;&quot;&quot;&quot;&quot;&amp;[.$W146]&amp;&quot;&quot;&quot;&quot;);[$JSON.$G$1];[.$Y146];[$JSON.$H$1];[.$H146];[$JSON.$I$1];[.J146];[$JSON.$J$1];[.$L146];[$JSON.$K$1];[.$O146];[$JSON.$L$1];[.$N146];[$JSON.$M$1];[.$R146];[$JSON.$N$1];[.$T146];[$JSON.$O$1];IF(ISNA([.$V146]);&quot;null&quot;;[.$V146]);[$JSON.$P$1];[.$X146];[$JSON.$Q$1];[.$A146];[$JSON.$R$1];[.$B146];[$JSON.$S$1])" office:value-type="string" office:string-value="{&quot;id&quot;:&quot;2-13&quot;,&quot;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orderTable&quot;:145,&quot;orderDeck&quot;:182}," calcext:value-type="string">
            <text:p>{"id":"2-13","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G147];[$収録番号.$A$1:$収録番号.$B$9];2;0)" office:value-type="float" office:value="25" calcext:value-type="float">
            <text:p>25</text:p>
          </table:table-cell>
          <table:table-cell office:value-type="string" calcext:value-type="string">
            <text:p>N</text:p>
          </table:table-cell>
          <table:table-cell table:formula="of:=VLOOKUP([.I147];[$レアリティ番号.$A$1:$レアリティ番号.$B$4];2;0)" office:value-type="float" office:value="1" calcext:value-type="float">
            <text:p>1</text:p>
          </table:table-cell>
          <table:table-cell office:value-type="string" calcext:value-type="string">
            <text:p>イジン</text:p>
          </table:table-cell>
          <table:table-cell table:formula="of:=VLOOKUP([.K147];[$種類番号.$A$1:$種類番号.$B$4];2;0)" office:value-type="float" office:value="1" calcext:value-type="float">
            <text:p>1</text:p>
          </table:table-cell>
          <table:table-cell office:value-type="string" calcext:value-type="string">
            <text:p>赤</text:p>
          </table:table-cell>
          <table:table-cell table:formula="of:=VLOOKUP([.M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7];[$能力語番号.$A$1:$能力語番号.$B$10];2;0);0)" office:value-type="float" office:value="0" calcext:value-type="float">
            <text:p>0</text:p>
          </table:table-cell>
          <table:table-cell office:value-type="string" calcext:value-type="string">
            <text:p>剣術</text:p>
          </table:table-cell>
          <table:table-cell table:formula="of:=IFERROR(VLOOKUP([.$S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IF(ISNA([.$S147]);&quot;null&quot;;&quot;&quot;&quot;&quot;&amp;[.$S147]&amp;&quot;&quot;&quot;&quot;);[$JSON.$E$1];[.$U147];[$JSON.$F$1];IF(ISNA([.$W147]);&quot;null&quot;;&quot;&quot;&quot;&quot;&amp;[.$W147]&amp;&quot;&quot;&quot;&quot;);[$JSON.$G$1];[.$Y147];[$JSON.$H$1];[.$H147];[$JSON.$I$1];[.J147];[$JSON.$J$1];[.$L147];[$JSON.$K$1];[.$O147];[$JSON.$L$1];[.$N147];[$JSON.$M$1];[.$R147];[$JSON.$N$1];[.$T147];[$JSON.$O$1];IF(ISNA([.$V147]);&quot;null&quot;;[.$V147]);[$JSON.$P$1];[.$X147];[$JSON.$Q$1];[.$A147];[$JSON.$R$1];[.$B147];[$JSON.$S$1])" office:value-type="string" office:string-value="{&quot;id&quot;:&quot;2-14&quot;,&quot;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orderTable&quot;:146,&quot;orderDeck&quot;:149}," calcext:value-type="string">
            <text:p>{"id":"2-14","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G148];[$収録番号.$A$1:$収録番号.$B$9];2;0)" office:value-type="float" office:value="25" calcext:value-type="float">
            <text:p>25</text:p>
          </table:table-cell>
          <table:table-cell office:value-type="string" calcext:value-type="string">
            <text:p>N</text:p>
          </table:table-cell>
          <table:table-cell table:formula="of:=VLOOKUP([.I148];[$レアリティ番号.$A$1:$レアリティ番号.$B$4];2;0)" office:value-type="float" office:value="1" calcext:value-type="float">
            <text:p>1</text:p>
          </table:table-cell>
          <table:table-cell office:value-type="string" calcext:value-type="string">
            <text:p>イジン</text:p>
          </table:table-cell>
          <table:table-cell table:formula="of:=VLOOKUP([.K148];[$種類番号.$A$1:$種類番号.$B$4];2;0)" office:value-type="float" office:value="1" calcext:value-type="float">
            <text:p>1</text:p>
          </table:table-cell>
          <table:table-cell office:value-type="string" calcext:value-type="string">
            <text:p>赤</text:p>
          </table:table-cell>
          <table:table-cell table:formula="of:=VLOOKUP([.M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office:value-type="float" office:value="7000" calcext:value-type="float">
            <text:p>7000</text:p>
          </table:table-cell>
          <table:table-cell table:style-name="ce8" table:formula="of:=NA()" office:value-type="string" office:string-value="" calcext:value-type="error">
            <text:p>#N/A</text:p>
          </table:table-cell>
          <table:table-cell table:formula="of:=IFERROR(VLOOKUP([.$W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IF(ISNA([.$S148]);&quot;null&quot;;&quot;&quot;&quot;&quot;&amp;[.$S148]&amp;&quot;&quot;&quot;&quot;);[$JSON.$E$1];[.$U148];[$JSON.$F$1];IF(ISNA([.$W148]);&quot;null&quot;;&quot;&quot;&quot;&quot;&amp;[.$W148]&amp;&quot;&quot;&quot;&quot;);[$JSON.$G$1];[.$Y148];[$JSON.$H$1];[.$H148];[$JSON.$I$1];[.J148];[$JSON.$J$1];[.$L148];[$JSON.$K$1];[.$O148];[$JSON.$L$1];[.$N148];[$JSON.$M$1];[.$R148];[$JSON.$N$1];[.$T148];[$JSON.$O$1];IF(ISNA([.$V148]);&quot;null&quot;;[.$V148]);[$JSON.$P$1];[.$X148];[$JSON.$Q$1];[.$A148];[$JSON.$R$1];[.$B148];[$JSON.$S$1])" office:value-type="string" office:string-value="{&quot;id&quot;:&quot;2-15&quot;,&quot;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orderTable&quot;:147,&quot;orderDeck&quot;:204}," calcext:value-type="string">
            <text:p>{"id":"2-15","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G149];[$収録番号.$A$1:$収録番号.$B$9];2;0)" office:value-type="float" office:value="25" calcext:value-type="float">
            <text:p>25</text:p>
          </table:table-cell>
          <table:table-cell office:value-type="string" calcext:value-type="string">
            <text:p>N</text:p>
          </table:table-cell>
          <table:table-cell table:formula="of:=VLOOKUP([.I149];[$レアリティ番号.$A$1:$レアリティ番号.$B$4];2;0)" office:value-type="float" office:value="1" calcext:value-type="float">
            <text:p>1</text:p>
          </table:table-cell>
          <table:table-cell office:value-type="string" calcext:value-type="string">
            <text:p>イジン</text:p>
          </table:table-cell>
          <table:table-cell table:formula="of:=VLOOKUP([.K149];[$種類番号.$A$1:$種類番号.$B$4];2;0)" office:value-type="float" office:value="1" calcext:value-type="float">
            <text:p>1</text:p>
          </table:table-cell>
          <table:table-cell office:value-type="string" calcext:value-type="string">
            <text:p>青</text:p>
          </table:table-cell>
          <table:table-cell table:formula="of:=VLOOKUP([.M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49];[$能力語番号.$A$1:$能力語番号.$B$10];2;0);0)" office:value-type="float" office:value="0" calcext:value-type="float">
            <text:p>0</text:p>
          </table:table-cell>
          <table:table-cell office:value-type="string" calcext:value-type="string">
            <text:p>思想</text:p>
          </table:table-cell>
          <table:table-cell table:formula="of:=IFERROR(VLOOKUP([.$S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IF(ISNA([.$S149]);&quot;null&quot;;&quot;&quot;&quot;&quot;&amp;[.$S149]&amp;&quot;&quot;&quot;&quot;);[$JSON.$E$1];[.$U149];[$JSON.$F$1];IF(ISNA([.$W149]);&quot;null&quot;;&quot;&quot;&quot;&quot;&amp;[.$W149]&amp;&quot;&quot;&quot;&quot;);[$JSON.$G$1];[.$Y149];[$JSON.$H$1];[.$H149];[$JSON.$I$1];[.J149];[$JSON.$J$1];[.$L149];[$JSON.$K$1];[.$O149];[$JSON.$L$1];[.$N149];[$JSON.$M$1];[.$R149];[$JSON.$N$1];[.$T149];[$JSON.$O$1];IF(ISNA([.$V149]);&quot;null&quot;;[.$V149]);[$JSON.$P$1];[.$X149];[$JSON.$Q$1];[.$A149];[$JSON.$R$1];[.$B149];[$JSON.$S$1])" office:value-type="string" office:string-value="{&quot;id&quot;:&quot;2-16&quot;,&quot;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orderTable&quot;:148,&quot;orderDeck&quot;:37}," calcext:value-type="string">
            <text:p>{"id":"2-16","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G150];[$収録番号.$A$1:$収録番号.$B$9];2;0)" office:value-type="float" office:value="25" calcext:value-type="float">
            <text:p>25</text:p>
          </table:table-cell>
          <table:table-cell office:value-type="string" calcext:value-type="string">
            <text:p>N</text:p>
          </table:table-cell>
          <table:table-cell table:formula="of:=VLOOKUP([.I150];[$レアリティ番号.$A$1:$レアリティ番号.$B$4];2;0)" office:value-type="float" office:value="1" calcext:value-type="float">
            <text:p>1</text:p>
          </table:table-cell>
          <table:table-cell office:value-type="string" calcext:value-type="string">
            <text:p>イジン</text:p>
          </table:table-cell>
          <table:table-cell table:formula="of:=VLOOKUP([.K150];[$種類番号.$A$1:$種類番号.$B$4];2;0)" office:value-type="float" office:value="1" calcext:value-type="float">
            <text:p>1</text:p>
          </table:table-cell>
          <table:table-cell office:value-type="string" calcext:value-type="string">
            <text:p>青</text:p>
          </table:table-cell>
          <table:table-cell table:formula="of:=VLOOKUP([.M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0];[$能力語番号.$A$1:$能力語番号.$B$10];2;0);0)" office:value-type="float" office:value="0" calcext:value-type="float">
            <text:p>0</text:p>
          </table:table-cell>
          <table:table-cell office:value-type="string" calcext:value-type="string">
            <text:p>思想</text:p>
          </table:table-cell>
          <table:table-cell table:formula="of:=IFERROR(VLOOKUP([.$S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IF(ISNA([.$S150]);&quot;null&quot;;&quot;&quot;&quot;&quot;&amp;[.$S150]&amp;&quot;&quot;&quot;&quot;);[$JSON.$E$1];[.$U150];[$JSON.$F$1];IF(ISNA([.$W150]);&quot;null&quot;;&quot;&quot;&quot;&quot;&amp;[.$W150]&amp;&quot;&quot;&quot;&quot;);[$JSON.$G$1];[.$Y150];[$JSON.$H$1];[.$H150];[$JSON.$I$1];[.J150];[$JSON.$J$1];[.$L150];[$JSON.$K$1];[.$O150];[$JSON.$L$1];[.$N150];[$JSON.$M$1];[.$R150];[$JSON.$N$1];[.$T150];[$JSON.$O$1];IF(ISNA([.$V150]);&quot;null&quot;;[.$V150]);[$JSON.$P$1];[.$X150];[$JSON.$Q$1];[.$A150];[$JSON.$R$1];[.$B150];[$JSON.$S$1])" office:value-type="string" office:string-value="{&quot;id&quot;:&quot;2-17&quot;,&quot;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orderTable&quot;:149,&quot;orderDeck&quot;:80}," calcext:value-type="string">
            <text:p>{"id":"2-17","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G151];[$収録番号.$A$1:$収録番号.$B$9];2;0)" office:value-type="float" office:value="25" calcext:value-type="float">
            <text:p>25</text:p>
          </table:table-cell>
          <table:table-cell office:value-type="string" calcext:value-type="string">
            <text:p>R</text:p>
          </table:table-cell>
          <table:table-cell table:formula="of:=VLOOKUP([.I151];[$レアリティ番号.$A$1:$レアリティ番号.$B$4];2;0)" office:value-type="float" office:value="2" calcext:value-type="float">
            <text:p>2</text:p>
          </table:table-cell>
          <table:table-cell office:value-type="string" calcext:value-type="string">
            <text:p>イジン</text:p>
          </table:table-cell>
          <table:table-cell table:formula="of:=VLOOKUP([.K151];[$種類番号.$A$1:$種類番号.$B$4];2;0)" office:value-type="float" office:value="1" calcext:value-type="float">
            <text:p>1</text:p>
          </table:table-cell>
          <table:table-cell office:value-type="string" calcext:value-type="string">
            <text:p>青</text:p>
          </table:table-cell>
          <table:table-cell table:formula="of:=VLOOKUP([.M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IF(ISNA([.$S151]);&quot;null&quot;;&quot;&quot;&quot;&quot;&amp;[.$S151]&amp;&quot;&quot;&quot;&quot;);[$JSON.$E$1];[.$U151];[$JSON.$F$1];IF(ISNA([.$W151]);&quot;null&quot;;&quot;&quot;&quot;&quot;&amp;[.$W151]&amp;&quot;&quot;&quot;&quot;);[$JSON.$G$1];[.$Y151];[$JSON.$H$1];[.$H151];[$JSON.$I$1];[.J151];[$JSON.$J$1];[.$L151];[$JSON.$K$1];[.$O151];[$JSON.$L$1];[.$N151];[$JSON.$M$1];[.$R151];[$JSON.$N$1];[.$T151];[$JSON.$O$1];IF(ISNA([.$V151]);&quot;null&quot;;[.$V151]);[$JSON.$P$1];[.$X151];[$JSON.$Q$1];[.$A151];[$JSON.$R$1];[.$B151];[$JSON.$S$1])" office:value-type="string" office:string-value="{&quot;id&quot;:&quot;2-18&quot;,&quot;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orderTable&quot;:150,&quot;orderDeck&quot;:38}," calcext:value-type="string">
            <text:p>{"id":"2-18","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G152];[$収録番号.$A$1:$収録番号.$B$9];2;0)" office:value-type="float" office:value="25" calcext:value-type="float">
            <text:p>25</text:p>
          </table:table-cell>
          <table:table-cell office:value-type="string" calcext:value-type="string">
            <text:p>N</text:p>
          </table:table-cell>
          <table:table-cell table:formula="of:=VLOOKUP([.I152];[$レアリティ番号.$A$1:$レアリティ番号.$B$4];2;0)" office:value-type="float" office:value="1" calcext:value-type="float">
            <text:p>1</text:p>
          </table:table-cell>
          <table:table-cell office:value-type="string" calcext:value-type="string">
            <text:p>イジン</text:p>
          </table:table-cell>
          <table:table-cell table:formula="of:=VLOOKUP([.K152];[$種類番号.$A$1:$種類番号.$B$4];2;0)" office:value-type="float" office:value="1" calcext:value-type="float">
            <text:p>1</text:p>
          </table:table-cell>
          <table:table-cell office:value-type="string" calcext:value-type="string">
            <text:p>青</text:p>
          </table:table-cell>
          <table:table-cell table:formula="of:=VLOOKUP([.M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2];[$能力語番号.$A$1:$能力語番号.$B$10];2;0);0)" office:value-type="float" office:value="0" calcext:value-type="float">
            <text:p>0</text:p>
          </table:table-cell>
          <table:table-cell office:value-type="string" calcext:value-type="string">
            <text:p>思想</text:p>
          </table:table-cell>
          <table:table-cell table:formula="of:=IFERROR(VLOOKUP([.$S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IF(ISNA([.$S152]);&quot;null&quot;;&quot;&quot;&quot;&quot;&amp;[.$S152]&amp;&quot;&quot;&quot;&quot;);[$JSON.$E$1];[.$U152];[$JSON.$F$1];IF(ISNA([.$W152]);&quot;null&quot;;&quot;&quot;&quot;&quot;&amp;[.$W152]&amp;&quot;&quot;&quot;&quot;);[$JSON.$G$1];[.$Y152];[$JSON.$H$1];[.$H152];[$JSON.$I$1];[.J152];[$JSON.$J$1];[.$L152];[$JSON.$K$1];[.$O152];[$JSON.$L$1];[.$N152];[$JSON.$M$1];[.$R152];[$JSON.$N$1];[.$T152];[$JSON.$O$1];IF(ISNA([.$V152]);&quot;null&quot;;[.$V152]);[$JSON.$P$1];[.$X152];[$JSON.$Q$1];[.$A152];[$JSON.$R$1];[.$B152];[$JSON.$S$1])" office:value-type="string" office:string-value="{&quot;id&quot;:&quot;2-19&quot;,&quot;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orderTable&quot;:151,&quot;orderDeck&quot;:8}," calcext:value-type="string">
            <text:p>{"id":"2-19","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G153];[$収録番号.$A$1:$収録番号.$B$9];2;0)" office:value-type="float" office:value="25" calcext:value-type="float">
            <text:p>25</text:p>
          </table:table-cell>
          <table:table-cell office:value-type="string" calcext:value-type="string">
            <text:p>N</text:p>
          </table:table-cell>
          <table:table-cell table:formula="of:=VLOOKUP([.I153];[$レアリティ番号.$A$1:$レアリティ番号.$B$4];2;0)" office:value-type="float" office:value="1" calcext:value-type="float">
            <text:p>1</text:p>
          </table:table-cell>
          <table:table-cell office:value-type="string" calcext:value-type="string">
            <text:p>イジン</text:p>
          </table:table-cell>
          <table:table-cell table:formula="of:=VLOOKUP([.K153];[$種類番号.$A$1:$種類番号.$B$4];2;0)" office:value-type="float" office:value="1" calcext:value-type="float">
            <text:p>1</text:p>
          </table:table-cell>
          <table:table-cell office:value-type="string" calcext:value-type="string">
            <text:p>青</text:p>
          </table:table-cell>
          <table:table-cell table:formula="of:=VLOOKUP([.M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IF(ISNA([.$S153]);&quot;null&quot;;&quot;&quot;&quot;&quot;&amp;[.$S153]&amp;&quot;&quot;&quot;&quot;);[$JSON.$E$1];[.$U153];[$JSON.$F$1];IF(ISNA([.$W153]);&quot;null&quot;;&quot;&quot;&quot;&quot;&amp;[.$W153]&amp;&quot;&quot;&quot;&quot;);[$JSON.$G$1];[.$Y153];[$JSON.$H$1];[.$H153];[$JSON.$I$1];[.J153];[$JSON.$J$1];[.$L153];[$JSON.$K$1];[.$O153];[$JSON.$L$1];[.$N153];[$JSON.$M$1];[.$R153];[$JSON.$N$1];[.$T153];[$JSON.$O$1];IF(ISNA([.$V153]);&quot;null&quot;;[.$V153]);[$JSON.$P$1];[.$X153];[$JSON.$Q$1];[.$A153];[$JSON.$R$1];[.$B153];[$JSON.$S$1])" office:value-type="string" office:string-value="{&quot;id&quot;:&quot;2-20&quot;,&quot;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orderTable&quot;:152,&quot;orderDeck&quot;:39}," calcext:value-type="string">
            <text:p>{"id":"2-20","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G154];[$収録番号.$A$1:$収録番号.$B$9];2;0)" office:value-type="float" office:value="25" calcext:value-type="float">
            <text:p>25</text:p>
          </table:table-cell>
          <table:table-cell office:value-type="string" calcext:value-type="string">
            <text:p>R</text:p>
          </table:table-cell>
          <table:table-cell table:formula="of:=VLOOKUP([.I154];[$レアリティ番号.$A$1:$レアリティ番号.$B$4];2;0)" office:value-type="float" office:value="2" calcext:value-type="float">
            <text:p>2</text:p>
          </table:table-cell>
          <table:table-cell office:value-type="string" calcext:value-type="string">
            <text:p>イジン</text:p>
          </table:table-cell>
          <table:table-cell table:formula="of:=VLOOKUP([.K154];[$種類番号.$A$1:$種類番号.$B$4];2;0)" office:value-type="float" office:value="1" calcext:value-type="float">
            <text:p>1</text:p>
          </table:table-cell>
          <table:table-cell office:value-type="string" calcext:value-type="string">
            <text:p>青</text:p>
          </table:table-cell>
          <table:table-cell table:formula="of:=VLOOKUP([.M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office:value-type="float" office:value="500" calcext:value-type="float">
            <text:p>500</text:p>
          </table:table-cell>
          <table:table-cell table:style-name="ce8" office:value-type="string" calcext:value-type="string">
            <text:p>反魂</text:p>
          </table:table-cell>
          <table:table-cell table:formula="of:=IFERROR(VLOOKUP([.$W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IF(ISNA([.$S154]);&quot;null&quot;;&quot;&quot;&quot;&quot;&amp;[.$S154]&amp;&quot;&quot;&quot;&quot;);[$JSON.$E$1];[.$U154];[$JSON.$F$1];IF(ISNA([.$W154]);&quot;null&quot;;&quot;&quot;&quot;&quot;&amp;[.$W154]&amp;&quot;&quot;&quot;&quot;);[$JSON.$G$1];[.$Y154];[$JSON.$H$1];[.$H154];[$JSON.$I$1];[.J154];[$JSON.$J$1];[.$L154];[$JSON.$K$1];[.$O154];[$JSON.$L$1];[.$N154];[$JSON.$M$1];[.$R154];[$JSON.$N$1];[.$T154];[$JSON.$O$1];IF(ISNA([.$V154]);&quot;null&quot;;[.$V154]);[$JSON.$P$1];[.$X154];[$JSON.$Q$1];[.$A154];[$JSON.$R$1];[.$B154];[$JSON.$S$1])" office:value-type="string" office:string-value="{&quot;id&quot;:&quot;2-21&quot;,&quot;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orderTable&quot;:153,&quot;orderDeck&quot;:81}," calcext:value-type="string">
            <text:p>{"id":"2-21","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G155];[$収録番号.$A$1:$収録番号.$B$9];2;0)" office:value-type="float" office:value="25" calcext:value-type="float">
            <text:p>25</text:p>
          </table:table-cell>
          <table:table-cell office:value-type="string" calcext:value-type="string">
            <text:p>N</text:p>
          </table:table-cell>
          <table:table-cell table:formula="of:=VLOOKUP([.I155];[$レアリティ番号.$A$1:$レアリティ番号.$B$4];2;0)" office:value-type="float" office:value="1" calcext:value-type="float">
            <text:p>1</text:p>
          </table:table-cell>
          <table:table-cell office:value-type="string" calcext:value-type="string">
            <text:p>イジン</text:p>
          </table:table-cell>
          <table:table-cell table:formula="of:=VLOOKUP([.K155];[$種類番号.$A$1:$種類番号.$B$4];2;0)" office:value-type="float" office:value="1" calcext:value-type="float">
            <text:p>1</text:p>
          </table:table-cell>
          <table:table-cell office:value-type="string" calcext:value-type="string">
            <text:p>青</text:p>
          </table:table-cell>
          <table:table-cell table:formula="of:=VLOOKUP([.M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IF(ISNA([.$S155]);&quot;null&quot;;&quot;&quot;&quot;&quot;&amp;[.$S155]&amp;&quot;&quot;&quot;&quot;);[$JSON.$E$1];[.$U155];[$JSON.$F$1];IF(ISNA([.$W155]);&quot;null&quot;;&quot;&quot;&quot;&quot;&amp;[.$W155]&amp;&quot;&quot;&quot;&quot;);[$JSON.$G$1];[.$Y155];[$JSON.$H$1];[.$H155];[$JSON.$I$1];[.J155];[$JSON.$J$1];[.$L155];[$JSON.$K$1];[.$O155];[$JSON.$L$1];[.$N155];[$JSON.$M$1];[.$R155];[$JSON.$N$1];[.$T155];[$JSON.$O$1];IF(ISNA([.$V155]);&quot;null&quot;;[.$V155]);[$JSON.$P$1];[.$X155];[$JSON.$Q$1];[.$A155];[$JSON.$R$1];[.$B155];[$JSON.$S$1])" office:value-type="string" office:string-value="{&quot;id&quot;:&quot;2-22&quot;,&quot;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orderTable&quot;:154,&quot;orderDeck&quot;:120}," calcext:value-type="string">
            <text:p>{"id":"2-22","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G156];[$収録番号.$A$1:$収録番号.$B$9];2;0)" office:value-type="float" office:value="25" calcext:value-type="float">
            <text:p>25</text:p>
          </table:table-cell>
          <table:table-cell office:value-type="string" calcext:value-type="string">
            <text:p>N</text:p>
          </table:table-cell>
          <table:table-cell table:formula="of:=VLOOKUP([.I156];[$レアリティ番号.$A$1:$レアリティ番号.$B$4];2;0)" office:value-type="float" office:value="1" calcext:value-type="float">
            <text:p>1</text:p>
          </table:table-cell>
          <table:table-cell office:value-type="string" calcext:value-type="string">
            <text:p>イジン</text:p>
          </table:table-cell>
          <table:table-cell table:formula="of:=VLOOKUP([.K156];[$種類番号.$A$1:$種類番号.$B$4];2;0)" office:value-type="float" office:value="1" calcext:value-type="float">
            <text:p>1</text:p>
          </table:table-cell>
          <table:table-cell office:value-type="string" calcext:value-type="string">
            <text:p>青</text:p>
          </table:table-cell>
          <table:table-cell table:formula="of:=VLOOKUP([.M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office:value-type="float" office:value="7000" calcext:value-type="float">
            <text:p>7000</text:p>
          </table:table-cell>
          <table:table-cell table:style-name="ce8" table:formula="of:=NA()" office:value-type="string" office:string-value="" calcext:value-type="error">
            <text:p>#N/A</text:p>
          </table:table-cell>
          <table:table-cell table:formula="of:=IFERROR(VLOOKUP([.$W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IF(ISNA([.$S156]);&quot;null&quot;;&quot;&quot;&quot;&quot;&amp;[.$S156]&amp;&quot;&quot;&quot;&quot;);[$JSON.$E$1];[.$U156];[$JSON.$F$1];IF(ISNA([.$W156]);&quot;null&quot;;&quot;&quot;&quot;&quot;&amp;[.$W156]&amp;&quot;&quot;&quot;&quot;);[$JSON.$G$1];[.$Y156];[$JSON.$H$1];[.$H156];[$JSON.$I$1];[.J156];[$JSON.$J$1];[.$L156];[$JSON.$K$1];[.$O156];[$JSON.$L$1];[.$N156];[$JSON.$M$1];[.$R156];[$JSON.$N$1];[.$T156];[$JSON.$O$1];IF(ISNA([.$V156]);&quot;null&quot;;[.$V156]);[$JSON.$P$1];[.$X156];[$JSON.$Q$1];[.$A156];[$JSON.$R$1];[.$B156];[$JSON.$S$1])" office:value-type="string" office:string-value="{&quot;id&quot;:&quot;2-23&quot;,&quot;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orderTable&quot;:155,&quot;orderDeck&quot;:205}," calcext:value-type="string">
            <text:p>{"id":"2-23","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G157];[$収録番号.$A$1:$収録番号.$B$9];2;0)" office:value-type="float" office:value="25" calcext:value-type="float">
            <text:p>25</text:p>
          </table:table-cell>
          <table:table-cell office:value-type="string" calcext:value-type="string">
            <text:p>N</text:p>
          </table:table-cell>
          <table:table-cell table:formula="of:=VLOOKUP([.I157];[$レアリティ番号.$A$1:$レアリティ番号.$B$4];2;0)" office:value-type="float" office:value="1" calcext:value-type="float">
            <text:p>1</text:p>
          </table:table-cell>
          <table:table-cell office:value-type="string" calcext:value-type="string">
            <text:p>イジン</text:p>
          </table:table-cell>
          <table:table-cell table:formula="of:=VLOOKUP([.K157];[$種類番号.$A$1:$種類番号.$B$4];2;0)" office:value-type="float" office:value="1" calcext:value-type="float">
            <text:p>1</text:p>
          </table:table-cell>
          <table:table-cell office:value-type="string" calcext:value-type="string">
            <text:p>青</text:p>
          </table:table-cell>
          <table:table-cell table:formula="of:=VLOOKUP([.M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Q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office:value-type="float" office:value="4000" calcext:value-type="float">
            <text:p>4000</text:p>
          </table:table-cell>
          <table:table-cell table:style-name="ce8" office:value-type="string" calcext:value-type="string">
            <text:p>1ドローする</text:p>
          </table:table-cell>
          <table:table-cell table:formula="of:=IFERROR(VLOOKUP([.$W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IF(ISNA([.$S157]);&quot;null&quot;;&quot;&quot;&quot;&quot;&amp;[.$S157]&amp;&quot;&quot;&quot;&quot;);[$JSON.$E$1];[.$U157];[$JSON.$F$1];IF(ISNA([.$W157]);&quot;null&quot;;&quot;&quot;&quot;&quot;&amp;[.$W157]&amp;&quot;&quot;&quot;&quot;);[$JSON.$G$1];[.$Y157];[$JSON.$H$1];[.$H157];[$JSON.$I$1];[.J157];[$JSON.$J$1];[.$L157];[$JSON.$K$1];[.$O157];[$JSON.$L$1];[.$N157];[$JSON.$M$1];[.$R157];[$JSON.$N$1];[.$T157];[$JSON.$O$1];IF(ISNA([.$V157]);&quot;null&quot;;[.$V157]);[$JSON.$P$1];[.$X157];[$JSON.$Q$1];[.$A157];[$JSON.$R$1];[.$B157];[$JSON.$S$1])" office:value-type="string" office:string-value="{&quot;id&quot;:&quot;2-24&quot;,&quot;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orderTable&quot;:156,&quot;orderDeck&quot;:159}," calcext:value-type="string">
            <text:p>{"id":"2-24","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G158];[$収録番号.$A$1:$収録番号.$B$9];2;0)" office:value-type="float" office:value="25" calcext:value-type="float">
            <text:p>25</text:p>
          </table:table-cell>
          <table:table-cell office:value-type="string" calcext:value-type="string">
            <text:p>N</text:p>
          </table:table-cell>
          <table:table-cell table:formula="of:=VLOOKUP([.I158];[$レアリティ番号.$A$1:$レアリティ番号.$B$4];2;0)" office:value-type="float" office:value="1" calcext:value-type="float">
            <text:p>1</text:p>
          </table:table-cell>
          <table:table-cell office:value-type="string" calcext:value-type="string">
            <text:p>イジン</text:p>
          </table:table-cell>
          <table:table-cell table:formula="of:=VLOOKUP([.K158];[$種類番号.$A$1:$種類番号.$B$4];2;0)" office:value-type="float" office:value="1" calcext:value-type="float">
            <text:p>1</text:p>
          </table:table-cell>
          <table:table-cell office:value-type="string" calcext:value-type="string">
            <text:p>緑</text:p>
          </table:table-cell>
          <table:table-cell table:formula="of:=VLOOKUP([.M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IF(ISNA([.$S158]);&quot;null&quot;;&quot;&quot;&quot;&quot;&amp;[.$S158]&amp;&quot;&quot;&quot;&quot;);[$JSON.$E$1];[.$U158];[$JSON.$F$1];IF(ISNA([.$W158]);&quot;null&quot;;&quot;&quot;&quot;&quot;&amp;[.$W158]&amp;&quot;&quot;&quot;&quot;);[$JSON.$G$1];[.$Y158];[$JSON.$H$1];[.$H158];[$JSON.$I$1];[.J158];[$JSON.$J$1];[.$L158];[$JSON.$K$1];[.$O158];[$JSON.$L$1];[.$N158];[$JSON.$M$1];[.$R158];[$JSON.$N$1];[.$T158];[$JSON.$O$1];IF(ISNA([.$V158]);&quot;null&quot;;[.$V158]);[$JSON.$P$1];[.$X158];[$JSON.$Q$1];[.$A158];[$JSON.$R$1];[.$B158];[$JSON.$S$1])" office:value-type="string" office:string-value="{&quot;id&quot;:&quot;2-25&quot;,&quot;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orderTable&quot;:157,&quot;orderDeck&quot;:194}," calcext:value-type="string">
            <text:p>{"id":"2-25","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G159];[$収録番号.$A$1:$収録番号.$B$9];2;0)" office:value-type="float" office:value="25" calcext:value-type="float">
            <text:p>25</text:p>
          </table:table-cell>
          <table:table-cell office:value-type="string" calcext:value-type="string">
            <text:p>R</text:p>
          </table:table-cell>
          <table:table-cell table:formula="of:=VLOOKUP([.I159];[$レアリティ番号.$A$1:$レアリティ番号.$B$4];2;0)" office:value-type="float" office:value="2" calcext:value-type="float">
            <text:p>2</text:p>
          </table:table-cell>
          <table:table-cell office:value-type="string" calcext:value-type="string">
            <text:p>イジン</text:p>
          </table:table-cell>
          <table:table-cell table:formula="of:=VLOOKUP([.K159];[$種類番号.$A$1:$種類番号.$B$4];2;0)" office:value-type="float" office:value="1" calcext:value-type="float">
            <text:p>1</text:p>
          </table:table-cell>
          <table:table-cell office:value-type="string" calcext:value-type="string">
            <text:p>緑</text:p>
          </table:table-cell>
          <table:table-cell table:formula="of:=VLOOKUP([.M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IF(ISNA([.$S159]);&quot;null&quot;;&quot;&quot;&quot;&quot;&amp;[.$S159]&amp;&quot;&quot;&quot;&quot;);[$JSON.$E$1];[.$U159];[$JSON.$F$1];IF(ISNA([.$W159]);&quot;null&quot;;&quot;&quot;&quot;&quot;&amp;[.$W159]&amp;&quot;&quot;&quot;&quot;);[$JSON.$G$1];[.$Y159];[$JSON.$H$1];[.$H159];[$JSON.$I$1];[.J159];[$JSON.$J$1];[.$L159];[$JSON.$K$1];[.$O159];[$JSON.$L$1];[.$N159];[$JSON.$M$1];[.$R159];[$JSON.$N$1];[.$T159];[$JSON.$O$1];IF(ISNA([.$V159]);&quot;null&quot;;[.$V159]);[$JSON.$P$1];[.$X159];[$JSON.$Q$1];[.$A159];[$JSON.$R$1];[.$B159];[$JSON.$S$1])" office:value-type="string" office:string-value="{&quot;id&quot;:&quot;2-26&quot;,&quot;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orderTable&quot;:158,&quot;orderDeck&quot;:47}," calcext:value-type="string">
            <text:p>{"id":"2-26","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G160];[$収録番号.$A$1:$収録番号.$B$9];2;0)" office:value-type="float" office:value="25" calcext:value-type="float">
            <text:p>25</text:p>
          </table:table-cell>
          <table:table-cell office:value-type="string" calcext:value-type="string">
            <text:p>R</text:p>
          </table:table-cell>
          <table:table-cell table:formula="of:=VLOOKUP([.I160];[$レアリティ番号.$A$1:$レアリティ番号.$B$4];2;0)" office:value-type="float" office:value="2" calcext:value-type="float">
            <text:p>2</text:p>
          </table:table-cell>
          <table:table-cell office:value-type="string" calcext:value-type="string">
            <text:p>イジン</text:p>
          </table:table-cell>
          <table:table-cell table:formula="of:=VLOOKUP([.K160];[$種類番号.$A$1:$種類番号.$B$4];2;0)" office:value-type="float" office:value="1" calcext:value-type="float">
            <text:p>1</text:p>
          </table:table-cell>
          <table:table-cell office:value-type="string" calcext:value-type="string">
            <text:p>緑</text:p>
          </table:table-cell>
          <table:table-cell table:formula="of:=VLOOKUP([.M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office:value-type="float" office:value="2000" calcext:value-type="float">
            <text:p>2000</text:p>
          </table:table-cell>
          <table:table-cell table:style-name="ce8" office:value-type="string" calcext:value-type="string">
            <text:p>反魂</text:p>
          </table:table-cell>
          <table:table-cell table:formula="of:=IFERROR(VLOOKUP([.$W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IF(ISNA([.$S160]);&quot;null&quot;;&quot;&quot;&quot;&quot;&amp;[.$S160]&amp;&quot;&quot;&quot;&quot;);[$JSON.$E$1];[.$U160];[$JSON.$F$1];IF(ISNA([.$W160]);&quot;null&quot;;&quot;&quot;&quot;&quot;&amp;[.$W160]&amp;&quot;&quot;&quot;&quot;);[$JSON.$G$1];[.$Y160];[$JSON.$H$1];[.$H160];[$JSON.$I$1];[.J160];[$JSON.$J$1];[.$L160];[$JSON.$K$1];[.$O160];[$JSON.$L$1];[.$N160];[$JSON.$M$1];[.$R160];[$JSON.$N$1];[.$T160];[$JSON.$O$1];IF(ISNA([.$V160]);&quot;null&quot;;[.$V160]);[$JSON.$P$1];[.$X160];[$JSON.$Q$1];[.$A160];[$JSON.$R$1];[.$B160];[$JSON.$S$1])" office:value-type="string" office:string-value="{&quot;id&quot;:&quot;2-27&quot;,&quot;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orderTable&quot;:159,&quot;orderDeck&quot;:89}," calcext:value-type="string">
            <text:p>{"id":"2-27","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G161];[$収録番号.$A$1:$収録番号.$B$9];2;0)" office:value-type="float" office:value="25" calcext:value-type="float">
            <text:p>25</text:p>
          </table:table-cell>
          <table:table-cell office:value-type="string" calcext:value-type="string">
            <text:p>N</text:p>
          </table:table-cell>
          <table:table-cell table:formula="of:=VLOOKUP([.I161];[$レアリティ番号.$A$1:$レアリティ番号.$B$4];2;0)" office:value-type="float" office:value="1" calcext:value-type="float">
            <text:p>1</text:p>
          </table:table-cell>
          <table:table-cell office:value-type="string" calcext:value-type="string">
            <text:p>イジン</text:p>
          </table:table-cell>
          <table:table-cell table:formula="of:=VLOOKUP([.K161];[$種類番号.$A$1:$種類番号.$B$4];2;0)" office:value-type="float" office:value="1" calcext:value-type="float">
            <text:p>1</text:p>
          </table:table-cell>
          <table:table-cell office:value-type="string" calcext:value-type="string">
            <text:p>緑</text:p>
          </table:table-cell>
          <table:table-cell table:formula="of:=VLOOKUP([.M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1];[$能力語番号.$A$1:$能力語番号.$B$10];2;0);0)" office:value-type="float" office:value="0" calcext:value-type="float">
            <text:p>0</text:p>
          </table:table-cell>
          <table:table-cell office:value-type="string" calcext:value-type="string">
            <text:p>美術</text:p>
          </table:table-cell>
          <table:table-cell table:formula="of:=IFERROR(VLOOKUP([.$S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office:value-type="float" office:value="5000" calcext:value-type="float">
            <text:p>5000</text:p>
          </table:table-cell>
          <table:table-cell table:style-name="ce8" office:value-type="string" calcext:value-type="string">
            <text:p>1ドローする</text:p>
          </table:table-cell>
          <table:table-cell table:formula="of:=IFERROR(VLOOKUP([.$W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IF(ISNA([.$S161]);&quot;null&quot;;&quot;&quot;&quot;&quot;&amp;[.$S161]&amp;&quot;&quot;&quot;&quot;);[$JSON.$E$1];[.$U161];[$JSON.$F$1];IF(ISNA([.$W161]);&quot;null&quot;;&quot;&quot;&quot;&quot;&amp;[.$W161]&amp;&quot;&quot;&quot;&quot;);[$JSON.$G$1];[.$Y161];[$JSON.$H$1];[.$H161];[$JSON.$I$1];[.J161];[$JSON.$J$1];[.$L161];[$JSON.$K$1];[.$O161];[$JSON.$L$1];[.$N161];[$JSON.$M$1];[.$R161];[$JSON.$N$1];[.$T161];[$JSON.$O$1];IF(ISNA([.$V161]);&quot;null&quot;;[.$V161]);[$JSON.$P$1];[.$X161];[$JSON.$Q$1];[.$A161];[$JSON.$R$1];[.$B161];[$JSON.$S$1])" office:value-type="string" office:string-value="{&quot;id&quot;:&quot;2-28&quot;,&quot;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orderTable&quot;:160,&quot;orderDeck&quot;:210}," calcext:value-type="string">
            <text:p>{"id":"2-28","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G162];[$収録番号.$A$1:$収録番号.$B$9];2;0)" office:value-type="float" office:value="25" calcext:value-type="float">
            <text:p>25</text:p>
          </table:table-cell>
          <table:table-cell office:value-type="string" calcext:value-type="string">
            <text:p>N</text:p>
          </table:table-cell>
          <table:table-cell table:formula="of:=VLOOKUP([.I162];[$レアリティ番号.$A$1:$レアリティ番号.$B$4];2;0)" office:value-type="float" office:value="1" calcext:value-type="float">
            <text:p>1</text:p>
          </table:table-cell>
          <table:table-cell office:value-type="string" calcext:value-type="string">
            <text:p>イジン</text:p>
          </table:table-cell>
          <table:table-cell table:formula="of:=VLOOKUP([.K162];[$種類番号.$A$1:$種類番号.$B$4];2;0)" office:value-type="float" office:value="1" calcext:value-type="float">
            <text:p>1</text:p>
          </table:table-cell>
          <table:table-cell office:value-type="string" calcext:value-type="string">
            <text:p>緑</text:p>
          </table:table-cell>
          <table:table-cell table:formula="of:=VLOOKUP([.M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IF(ISNA([.$S162]);&quot;null&quot;;&quot;&quot;&quot;&quot;&amp;[.$S162]&amp;&quot;&quot;&quot;&quot;);[$JSON.$E$1];[.$U162];[$JSON.$F$1];IF(ISNA([.$W162]);&quot;null&quot;;&quot;&quot;&quot;&quot;&amp;[.$W162]&amp;&quot;&quot;&quot;&quot;);[$JSON.$G$1];[.$Y162];[$JSON.$H$1];[.$H162];[$JSON.$I$1];[.J162];[$JSON.$J$1];[.$L162];[$JSON.$K$1];[.$O162];[$JSON.$L$1];[.$N162];[$JSON.$M$1];[.$R162];[$JSON.$N$1];[.$T162];[$JSON.$O$1];IF(ISNA([.$V162]);&quot;null&quot;;[.$V162]);[$JSON.$P$1];[.$X162];[$JSON.$Q$1];[.$A162];[$JSON.$R$1];[.$B162];[$JSON.$S$1])" office:value-type="string" office:string-value="{&quot;id&quot;:&quot;2-29&quot;,&quot;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orderTable&quot;:161,&quot;orderDeck&quot;:128}," calcext:value-type="string">
            <text:p>{"id":"2-29","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G163];[$収録番号.$A$1:$収録番号.$B$9];2;0)" office:value-type="float" office:value="25" calcext:value-type="float">
            <text:p>25</text:p>
          </table:table-cell>
          <table:table-cell office:value-type="string" calcext:value-type="string">
            <text:p>N</text:p>
          </table:table-cell>
          <table:table-cell table:formula="of:=VLOOKUP([.I163];[$レアリティ番号.$A$1:$レアリティ番号.$B$4];2;0)" office:value-type="float" office:value="1" calcext:value-type="float">
            <text:p>1</text:p>
          </table:table-cell>
          <table:table-cell office:value-type="string" calcext:value-type="string">
            <text:p>イジン</text:p>
          </table:table-cell>
          <table:table-cell table:formula="of:=VLOOKUP([.K163];[$種類番号.$A$1:$種類番号.$B$4];2;0)" office:value-type="float" office:value="1" calcext:value-type="float">
            <text:p>1</text:p>
          </table:table-cell>
          <table:table-cell office:value-type="string" calcext:value-type="string">
            <text:p>緑</text:p>
          </table:table-cell>
          <table:table-cell table:formula="of:=VLOOKUP([.M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IF(ISNA([.$S163]);&quot;null&quot;;&quot;&quot;&quot;&quot;&amp;[.$S163]&amp;&quot;&quot;&quot;&quot;);[$JSON.$E$1];[.$U163];[$JSON.$F$1];IF(ISNA([.$W163]);&quot;null&quot;;&quot;&quot;&quot;&quot;&amp;[.$W163]&amp;&quot;&quot;&quot;&quot;);[$JSON.$G$1];[.$Y163];[$JSON.$H$1];[.$H163];[$JSON.$I$1];[.J163];[$JSON.$J$1];[.$L163];[$JSON.$K$1];[.$O163];[$JSON.$L$1];[.$N163];[$JSON.$M$1];[.$R163];[$JSON.$N$1];[.$T163];[$JSON.$O$1];IF(ISNA([.$V163]);&quot;null&quot;;[.$V163]);[$JSON.$P$1];[.$X163];[$JSON.$Q$1];[.$A163];[$JSON.$R$1];[.$B163];[$JSON.$S$1])" office:value-type="string" office:string-value="{&quot;id&quot;:&quot;2-30&quot;,&quot;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orderTable&quot;:162,&quot;orderDeck&quot;:168}," calcext:value-type="string">
            <text:p>{"id":"2-30","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G164];[$収録番号.$A$1:$収録番号.$B$9];2;0)" office:value-type="float" office:value="25" calcext:value-type="float">
            <text:p>25</text:p>
          </table:table-cell>
          <table:table-cell office:value-type="string" calcext:value-type="string">
            <text:p>N</text:p>
          </table:table-cell>
          <table:table-cell table:formula="of:=VLOOKUP([.I164];[$レアリティ番号.$A$1:$レアリティ番号.$B$4];2;0)" office:value-type="float" office:value="1" calcext:value-type="float">
            <text:p>1</text:p>
          </table:table-cell>
          <table:table-cell office:value-type="string" calcext:value-type="string">
            <text:p>イジン</text:p>
          </table:table-cell>
          <table:table-cell table:formula="of:=VLOOKUP([.K164];[$種類番号.$A$1:$種類番号.$B$4];2;0)" office:value-type="float" office:value="1" calcext:value-type="float">
            <text:p>1</text:p>
          </table:table-cell>
          <table:table-cell office:value-type="string" calcext:value-type="string">
            <text:p>緑</text:p>
          </table:table-cell>
          <table:table-cell table:formula="of:=VLOOKUP([.M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4];[$能力語番号.$A$1:$能力語番号.$B$10];2;0);0)" office:value-type="float" office:value="0" calcext:value-type="float">
            <text:p>0</text:p>
          </table:table-cell>
          <table:table-cell office:value-type="string" calcext:value-type="string">
            <text:p>美術</text:p>
          </table:table-cell>
          <table:table-cell table:formula="of:=IFERROR(VLOOKUP([.$S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office:value-type="float" office:value="7000" calcext:value-type="float">
            <text:p>7000</text:p>
          </table:table-cell>
          <table:table-cell table:style-name="ce8" office:value-type="string" calcext:value-type="string">
            <text:p>1ドローする</text:p>
          </table:table-cell>
          <table:table-cell table:formula="of:=IFERROR(VLOOKUP([.$W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IF(ISNA([.$S164]);&quot;null&quot;;&quot;&quot;&quot;&quot;&amp;[.$S164]&amp;&quot;&quot;&quot;&quot;);[$JSON.$E$1];[.$U164];[$JSON.$F$1];IF(ISNA([.$W164]);&quot;null&quot;;&quot;&quot;&quot;&quot;&amp;[.$W164]&amp;&quot;&quot;&quot;&quot;);[$JSON.$G$1];[.$Y164];[$JSON.$H$1];[.$H164];[$JSON.$I$1];[.J164];[$JSON.$J$1];[.$L164];[$JSON.$K$1];[.$O164];[$JSON.$L$1];[.$N164];[$JSON.$M$1];[.$R164];[$JSON.$N$1];[.$T164];[$JSON.$O$1];IF(ISNA([.$V164]);&quot;null&quot;;[.$V164]);[$JSON.$P$1];[.$X164];[$JSON.$Q$1];[.$A164];[$JSON.$R$1];[.$B164];[$JSON.$S$1])" office:value-type="string" office:string-value="{&quot;id&quot;:&quot;2-31&quot;,&quot;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orderTable&quot;:163,&quot;orderDeck&quot;:223}," calcext:value-type="string">
            <text:p>{"id":"2-31","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G165];[$収録番号.$A$1:$収録番号.$B$9];2;0)" office:value-type="float" office:value="25" calcext:value-type="float">
            <text:p>25</text:p>
          </table:table-cell>
          <table:table-cell office:value-type="string" calcext:value-type="string">
            <text:p>R</text:p>
          </table:table-cell>
          <table:table-cell table:formula="of:=VLOOKUP([.I165];[$レアリティ番号.$A$1:$レアリティ番号.$B$4];2;0)" office:value-type="float" office:value="2" calcext:value-type="float">
            <text:p>2</text:p>
          </table:table-cell>
          <table:table-cell office:value-type="string" calcext:value-type="string">
            <text:p>イジン</text:p>
          </table:table-cell>
          <table:table-cell table:formula="of:=VLOOKUP([.K165];[$種類番号.$A$1:$種類番号.$B$4];2;0)" office:value-type="float" office:value="1" calcext:value-type="float">
            <text:p>1</text:p>
          </table:table-cell>
          <table:table-cell office:value-type="string" calcext:value-type="string">
            <text:p>黄</text:p>
          </table:table-cell>
          <table:table-cell table:formula="of:=VLOOKUP([.M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Q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S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IF(ISNA([.$S165]);&quot;null&quot;;&quot;&quot;&quot;&quot;&amp;[.$S165]&amp;&quot;&quot;&quot;&quot;);[$JSON.$E$1];[.$U165];[$JSON.$F$1];IF(ISNA([.$W165]);&quot;null&quot;;&quot;&quot;&quot;&quot;&amp;[.$W165]&amp;&quot;&quot;&quot;&quot;);[$JSON.$G$1];[.$Y165];[$JSON.$H$1];[.$H165];[$JSON.$I$1];[.J165];[$JSON.$J$1];[.$L165];[$JSON.$K$1];[.$O165];[$JSON.$L$1];[.$N165];[$JSON.$M$1];[.$R165];[$JSON.$N$1];[.$T165];[$JSON.$O$1];IF(ISNA([.$V165]);&quot;null&quot;;[.$V165]);[$JSON.$P$1];[.$X165];[$JSON.$Q$1];[.$A165];[$JSON.$R$1];[.$B165];[$JSON.$S$1])" office:value-type="string" office:string-value="{&quot;id&quot;:&quot;2-32&quot;,&quot;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orderTable&quot;:164,&quot;orderDeck&quot;:134}," calcext:value-type="string">
            <text:p>{"id":"2-32","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G166];[$収録番号.$A$1:$収録番号.$B$9];2;0)" office:value-type="float" office:value="25" calcext:value-type="float">
            <text:p>25</text:p>
          </table:table-cell>
          <table:table-cell office:value-type="string" calcext:value-type="string">
            <text:p>N</text:p>
          </table:table-cell>
          <table:table-cell table:formula="of:=VLOOKUP([.I166];[$レアリティ番号.$A$1:$レアリティ番号.$B$4];2;0)" office:value-type="float" office:value="1" calcext:value-type="float">
            <text:p>1</text:p>
          </table:table-cell>
          <table:table-cell office:value-type="string" calcext:value-type="string">
            <text:p>イジン</text:p>
          </table:table-cell>
          <table:table-cell table:formula="of:=VLOOKUP([.K166];[$種類番号.$A$1:$種類番号.$B$4];2;0)" office:value-type="float" office:value="1" calcext:value-type="float">
            <text:p>1</text:p>
          </table:table-cell>
          <table:table-cell office:value-type="string" calcext:value-type="string">
            <text:p>黄</text:p>
          </table:table-cell>
          <table:table-cell table:formula="of:=VLOOKUP([.M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office:value-type="float" office:value="1000" calcext:value-type="float">
            <text:p>1000</text:p>
          </table:table-cell>
          <table:table-cell table:style-name="ce8" office:value-type="string" calcext:value-type="string">
            <text:p>反魂</text:p>
          </table:table-cell>
          <table:table-cell table:formula="of:=IFERROR(VLOOKUP([.$W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IF(ISNA([.$S166]);&quot;null&quot;;&quot;&quot;&quot;&quot;&amp;[.$S166]&amp;&quot;&quot;&quot;&quot;);[$JSON.$E$1];[.$U166];[$JSON.$F$1];IF(ISNA([.$W166]);&quot;null&quot;;&quot;&quot;&quot;&quot;&amp;[.$W166]&amp;&quot;&quot;&quot;&quot;);[$JSON.$G$1];[.$Y166];[$JSON.$H$1];[.$H166];[$JSON.$I$1];[.J166];[$JSON.$J$1];[.$L166];[$JSON.$K$1];[.$O166];[$JSON.$L$1];[.$N166];[$JSON.$M$1];[.$R166];[$JSON.$N$1];[.$T166];[$JSON.$O$1];IF(ISNA([.$V166]);&quot;null&quot;;[.$V166]);[$JSON.$P$1];[.$X166];[$JSON.$Q$1];[.$A166];[$JSON.$R$1];[.$B166];[$JSON.$S$1])" office:value-type="string" office:string-value="{&quot;id&quot;:&quot;2-33&quot;,&quot;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orderTable&quot;:165,&quot;orderDeck&quot;:54}," calcext:value-type="string">
            <text:p>{"id":"2-33","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G167];[$収録番号.$A$1:$収録番号.$B$9];2;0)" office:value-type="float" office:value="25" calcext:value-type="float">
            <text:p>25</text:p>
          </table:table-cell>
          <table:table-cell office:value-type="string" calcext:value-type="string">
            <text:p>N</text:p>
          </table:table-cell>
          <table:table-cell table:formula="of:=VLOOKUP([.I167];[$レアリティ番号.$A$1:$レアリティ番号.$B$4];2;0)" office:value-type="float" office:value="1" calcext:value-type="float">
            <text:p>1</text:p>
          </table:table-cell>
          <table:table-cell office:value-type="string" calcext:value-type="string">
            <text:p>イジン</text:p>
          </table:table-cell>
          <table:table-cell table:formula="of:=VLOOKUP([.K167];[$種類番号.$A$1:$種類番号.$B$4];2;0)" office:value-type="float" office:value="1" calcext:value-type="float">
            <text:p>1</text:p>
          </table:table-cell>
          <table:table-cell office:value-type="string" calcext:value-type="string">
            <text:p>黄</text:p>
          </table:table-cell>
          <table:table-cell table:formula="of:=VLOOKUP([.M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IF(ISNA([.$S167]);&quot;null&quot;;&quot;&quot;&quot;&quot;&amp;[.$S167]&amp;&quot;&quot;&quot;&quot;);[$JSON.$E$1];[.$U167];[$JSON.$F$1];IF(ISNA([.$W167]);&quot;null&quot;;&quot;&quot;&quot;&quot;&amp;[.$W167]&amp;&quot;&quot;&quot;&quot;);[$JSON.$G$1];[.$Y167];[$JSON.$H$1];[.$H167];[$JSON.$I$1];[.J167];[$JSON.$J$1];[.$L167];[$JSON.$K$1];[.$O167];[$JSON.$L$1];[.$N167];[$JSON.$M$1];[.$R167];[$JSON.$N$1];[.$T167];[$JSON.$O$1];IF(ISNA([.$V167]);&quot;null&quot;;[.$V167]);[$JSON.$P$1];[.$X167];[$JSON.$Q$1];[.$A167];[$JSON.$R$1];[.$B167];[$JSON.$S$1])" office:value-type="string" office:string-value="{&quot;id&quot;:&quot;2-34&quot;,&quot;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orderTable&quot;:166,&quot;orderDeck&quot;:94}," calcext:value-type="string">
            <text:p>{"id":"2-34","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G168];[$収録番号.$A$1:$収録番号.$B$9];2;0)" office:value-type="float" office:value="25" calcext:value-type="float">
            <text:p>25</text:p>
          </table:table-cell>
          <table:table-cell office:value-type="string" calcext:value-type="string">
            <text:p>N</text:p>
          </table:table-cell>
          <table:table-cell table:formula="of:=VLOOKUP([.I168];[$レアリティ番号.$A$1:$レアリティ番号.$B$4];2;0)" office:value-type="float" office:value="1" calcext:value-type="float">
            <text:p>1</text:p>
          </table:table-cell>
          <table:table-cell office:value-type="string" calcext:value-type="string">
            <text:p>イジン</text:p>
          </table:table-cell>
          <table:table-cell table:formula="of:=VLOOKUP([.K168];[$種類番号.$A$1:$種類番号.$B$4];2;0)" office:value-type="float" office:value="1" calcext:value-type="float">
            <text:p>1</text:p>
          </table:table-cell>
          <table:table-cell office:value-type="string" calcext:value-type="string">
            <text:p>黄</text:p>
          </table:table-cell>
          <table:table-cell table:formula="of:=VLOOKUP([.M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office:value-type="float" office:value="4000" calcext:value-type="float">
            <text:p>4000</text:p>
          </table:table-cell>
          <table:table-cell table:style-name="ce8" office:value-type="string" calcext:value-type="string">
            <text:p>1ドローする</text:p>
          </table:table-cell>
          <table:table-cell table:formula="of:=IFERROR(VLOOKUP([.$W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IF(ISNA([.$S168]);&quot;null&quot;;&quot;&quot;&quot;&quot;&amp;[.$S168]&amp;&quot;&quot;&quot;&quot;);[$JSON.$E$1];[.$U168];[$JSON.$F$1];IF(ISNA([.$W168]);&quot;null&quot;;&quot;&quot;&quot;&quot;&amp;[.$W168]&amp;&quot;&quot;&quot;&quot;);[$JSON.$G$1];[.$Y168];[$JSON.$H$1];[.$H168];[$JSON.$I$1];[.J168];[$JSON.$J$1];[.$L168];[$JSON.$K$1];[.$O168];[$JSON.$L$1];[.$N168];[$JSON.$M$1];[.$R168];[$JSON.$N$1];[.$T168];[$JSON.$O$1];IF(ISNA([.$V168]);&quot;null&quot;;[.$V168]);[$JSON.$P$1];[.$X168];[$JSON.$Q$1];[.$A168];[$JSON.$R$1];[.$B168];[$JSON.$S$1])" office:value-type="string" office:string-value="{&quot;id&quot;:&quot;2-35&quot;,&quot;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orderTable&quot;:167,&quot;orderDeck&quot;:172}," calcext:value-type="string">
            <text:p>{"id":"2-35","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G169];[$収録番号.$A$1:$収録番号.$B$9];2;0)" office:value-type="float" office:value="25" calcext:value-type="float">
            <text:p>25</text:p>
          </table:table-cell>
          <table:table-cell office:value-type="string" calcext:value-type="string">
            <text:p>N</text:p>
          </table:table-cell>
          <table:table-cell table:formula="of:=VLOOKUP([.I169];[$レアリティ番号.$A$1:$レアリティ番号.$B$4];2;0)" office:value-type="float" office:value="1" calcext:value-type="float">
            <text:p>1</text:p>
          </table:table-cell>
          <table:table-cell office:value-type="string" calcext:value-type="string">
            <text:p>イジン</text:p>
          </table:table-cell>
          <table:table-cell table:formula="of:=VLOOKUP([.K169];[$種類番号.$A$1:$種類番号.$B$4];2;0)" office:value-type="float" office:value="1" calcext:value-type="float">
            <text:p>1</text:p>
          </table:table-cell>
          <table:table-cell office:value-type="string" calcext:value-type="string">
            <text:p>黄</text:p>
          </table:table-cell>
          <table:table-cell table:formula="of:=VLOOKUP([.M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office:value-type="float" office:value="6000" calcext:value-type="float">
            <text:p>6000</text:p>
          </table:table-cell>
          <table:table-cell table:style-name="ce8" office:value-type="string" calcext:value-type="string">
            <text:p>魔力化</text:p>
          </table:table-cell>
          <table:table-cell table:formula="of:=IFERROR(VLOOKUP([.$W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IF(ISNA([.$S169]);&quot;null&quot;;&quot;&quot;&quot;&quot;&amp;[.$S169]&amp;&quot;&quot;&quot;&quot;);[$JSON.$E$1];[.$U169];[$JSON.$F$1];IF(ISNA([.$W169]);&quot;null&quot;;&quot;&quot;&quot;&quot;&amp;[.$W169]&amp;&quot;&quot;&quot;&quot;);[$JSON.$G$1];[.$Y169];[$JSON.$H$1];[.$H169];[$JSON.$I$1];[.J169];[$JSON.$J$1];[.$L169];[$JSON.$K$1];[.$O169];[$JSON.$L$1];[.$N169];[$JSON.$M$1];[.$R169];[$JSON.$N$1];[.$T169];[$JSON.$O$1];IF(ISNA([.$V169]);&quot;null&quot;;[.$V169]);[$JSON.$P$1];[.$X169];[$JSON.$Q$1];[.$A169];[$JSON.$R$1];[.$B169];[$JSON.$S$1])" office:value-type="string" office:string-value="{&quot;id&quot;:&quot;2-36&quot;,&quot;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orderTable&quot;:168,&quot;orderDeck&quot;:215}," calcext:value-type="string">
            <text:p>{"id":"2-36","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G170];[$収録番号.$A$1:$収録番号.$B$9];2;0)" office:value-type="float" office:value="25" calcext:value-type="float">
            <text:p>25</text:p>
          </table:table-cell>
          <table:table-cell office:value-type="string" calcext:value-type="string">
            <text:p>N</text:p>
          </table:table-cell>
          <table:table-cell table:formula="of:=VLOOKUP([.I170];[$レアリティ番号.$A$1:$レアリティ番号.$B$4];2;0)" office:value-type="float" office:value="1" calcext:value-type="float">
            <text:p>1</text:p>
          </table:table-cell>
          <table:table-cell office:value-type="string" calcext:value-type="string">
            <text:p>イジン</text:p>
          </table:table-cell>
          <table:table-cell table:formula="of:=VLOOKUP([.K170];[$種類番号.$A$1:$種類番号.$B$4];2;0)" office:value-type="float" office:value="1" calcext:value-type="float">
            <text:p>1</text:p>
          </table:table-cell>
          <table:table-cell office:value-type="string" calcext:value-type="string">
            <text:p>黄</text:p>
          </table:table-cell>
          <table:table-cell table:formula="of:=VLOOKUP([.M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office:value-type="float" office:value="7000" calcext:value-type="float">
            <text:p>7000</text:p>
          </table:table-cell>
          <table:table-cell table:style-name="ce8" table:formula="of:=NA()" office:value-type="string" office:string-value="" calcext:value-type="error">
            <text:p>#N/A</text:p>
          </table:table-cell>
          <table:table-cell table:formula="of:=IFERROR(VLOOKUP([.$W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IF(ISNA([.$S170]);&quot;null&quot;;&quot;&quot;&quot;&quot;&amp;[.$S170]&amp;&quot;&quot;&quot;&quot;);[$JSON.$E$1];[.$U170];[$JSON.$F$1];IF(ISNA([.$W170]);&quot;null&quot;;&quot;&quot;&quot;&quot;&amp;[.$W170]&amp;&quot;&quot;&quot;&quot;);[$JSON.$G$1];[.$Y170];[$JSON.$H$1];[.$H170];[$JSON.$I$1];[.J170];[$JSON.$J$1];[.$L170];[$JSON.$K$1];[.$O170];[$JSON.$L$1];[.$N170];[$JSON.$M$1];[.$R170];[$JSON.$N$1];[.$T170];[$JSON.$O$1];IF(ISNA([.$V170]);&quot;null&quot;;[.$V170]);[$JSON.$P$1];[.$X170];[$JSON.$Q$1];[.$A170];[$JSON.$R$1];[.$B170];[$JSON.$S$1])" office:value-type="string" office:string-value="{&quot;id&quot;:&quot;2-37&quot;,&quot;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orderTable&quot;:169,&quot;orderDeck&quot;:232}," calcext:value-type="string">
            <text:p>{"id":"2-37","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G171];[$収録番号.$A$1:$収録番号.$B$9];2;0)" office:value-type="float" office:value="25" calcext:value-type="float">
            <text:p>25</text:p>
          </table:table-cell>
          <table:table-cell office:value-type="string" calcext:value-type="string">
            <text:p>R</text:p>
          </table:table-cell>
          <table:table-cell table:formula="of:=VLOOKUP([.I171];[$レアリティ番号.$A$1:$レアリティ番号.$B$4];2;0)" office:value-type="float" office:value="2" calcext:value-type="float">
            <text:p>2</text:p>
          </table:table-cell>
          <table:table-cell office:value-type="string" calcext:value-type="string">
            <text:p>イジン</text:p>
          </table:table-cell>
          <table:table-cell table:formula="of:=VLOOKUP([.K171];[$種類番号.$A$1:$種類番号.$B$4];2;0)" office:value-type="float" office:value="1" calcext:value-type="float">
            <text:p>1</text:p>
          </table:table-cell>
          <table:table-cell office:value-type="string" calcext:value-type="string">
            <text:p>黄</text:p>
          </table:table-cell>
          <table:table-cell table:formula="of:=VLOOKUP([.M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office:value-type="float" office:value="6000" calcext:value-type="float">
            <text:p>6000</text:p>
          </table:table-cell>
          <table:table-cell table:style-name="ce8" office:value-type="string" calcext:value-type="string">
            <text:p>魔力化</text:p>
          </table:table-cell>
          <table:table-cell table:formula="of:=IFERROR(VLOOKUP([.$W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IF(ISNA([.$S171]);&quot;null&quot;;&quot;&quot;&quot;&quot;&amp;[.$S171]&amp;&quot;&quot;&quot;&quot;);[$JSON.$E$1];[.$U171];[$JSON.$F$1];IF(ISNA([.$W171]);&quot;null&quot;;&quot;&quot;&quot;&quot;&amp;[.$W171]&amp;&quot;&quot;&quot;&quot;);[$JSON.$G$1];[.$Y171];[$JSON.$H$1];[.$H171];[$JSON.$I$1];[.J171];[$JSON.$J$1];[.$L171];[$JSON.$K$1];[.$O171];[$JSON.$L$1];[.$N171];[$JSON.$M$1];[.$R171];[$JSON.$N$1];[.$T171];[$JSON.$O$1];IF(ISNA([.$V171]);&quot;null&quot;;[.$V171]);[$JSON.$P$1];[.$X171];[$JSON.$Q$1];[.$A171];[$JSON.$R$1];[.$B171];[$JSON.$S$1])" office:value-type="string" office:string-value="{&quot;id&quot;:&quot;2-38&quot;,&quot;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orderTable&quot;:170,&quot;orderDeck&quot;:225}," calcext:value-type="string">
            <text:p>{"id":"2-38","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G172];[$収録番号.$A$1:$収録番号.$B$9];2;0)" office:value-type="float" office:value="25" calcext:value-type="float">
            <text:p>25</text:p>
          </table:table-cell>
          <table:table-cell office:value-type="string" calcext:value-type="string">
            <text:p>N</text:p>
          </table:table-cell>
          <table:table-cell table:formula="of:=VLOOKUP([.I172];[$レアリティ番号.$A$1:$レアリティ番号.$B$4];2;0)" office:value-type="float" office:value="1" calcext:value-type="float">
            <text:p>1</text:p>
          </table:table-cell>
          <table:table-cell office:value-type="string" calcext:value-type="string">
            <text:p>イジン</text:p>
          </table:table-cell>
          <table:table-cell table:formula="of:=VLOOKUP([.K172];[$種類番号.$A$1:$種類番号.$B$4];2;0)" office:value-type="float" office:value="1" calcext:value-type="float">
            <text:p>1</text:p>
          </table:table-cell>
          <table:table-cell office:value-type="string" calcext:value-type="string">
            <text:p>黄</text:p>
          </table:table-cell>
          <table:table-cell table:formula="of:=VLOOKUP([.M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Q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IF(ISNA([.$S172]);&quot;null&quot;;&quot;&quot;&quot;&quot;&amp;[.$S172]&amp;&quot;&quot;&quot;&quot;);[$JSON.$E$1];[.$U172];[$JSON.$F$1];IF(ISNA([.$W172]);&quot;null&quot;;&quot;&quot;&quot;&quot;&amp;[.$W172]&amp;&quot;&quot;&quot;&quot;);[$JSON.$G$1];[.$Y172];[$JSON.$H$1];[.$H172];[$JSON.$I$1];[.J172];[$JSON.$J$1];[.$L172];[$JSON.$K$1];[.$O172];[$JSON.$L$1];[.$N172];[$JSON.$M$1];[.$R172];[$JSON.$N$1];[.$T172];[$JSON.$O$1];IF(ISNA([.$V172]);&quot;null&quot;;[.$V172]);[$JSON.$P$1];[.$X172];[$JSON.$Q$1];[.$A172];[$JSON.$R$1];[.$B172];[$JSON.$S$1])" office:value-type="string" office:string-value="{&quot;id&quot;:&quot;2-39&quot;,&quot;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orderTable&quot;:171,&quot;orderDeck&quot;:16}," calcext:value-type="string">
            <text:p>{"id":"2-39","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G173];[$収録番号.$A$1:$収録番号.$B$9];2;0)" office:value-type="float" office:value="25" calcext:value-type="float">
            <text:p>25</text:p>
          </table:table-cell>
          <table:table-cell office:value-type="string" calcext:value-type="string">
            <text:p>N</text:p>
          </table:table-cell>
          <table:table-cell table:formula="of:=VLOOKUP([.I173];[$レアリティ番号.$A$1:$レアリティ番号.$B$4];2;0)" office:value-type="float" office:value="1" calcext:value-type="float">
            <text:p>1</text:p>
          </table:table-cell>
          <table:table-cell office:value-type="string" calcext:value-type="string">
            <text:p>イジン</text:p>
          </table:table-cell>
          <table:table-cell table:formula="of:=VLOOKUP([.K173];[$種類番号.$A$1:$種類番号.$B$4];2;0)" office:value-type="float" office:value="1" calcext:value-type="float">
            <text:p>1</text:p>
          </table:table-cell>
          <table:table-cell office:value-type="string" calcext:value-type="string">
            <text:p>黄</text:p>
          </table:table-cell>
          <table:table-cell table:formula="of:=VLOOKUP([.M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IF(ISNA([.$S173]);&quot;null&quot;;&quot;&quot;&quot;&quot;&amp;[.$S173]&amp;&quot;&quot;&quot;&quot;);[$JSON.$E$1];[.$U173];[$JSON.$F$1];IF(ISNA([.$W173]);&quot;null&quot;;&quot;&quot;&quot;&quot;&amp;[.$W173]&amp;&quot;&quot;&quot;&quot;);[$JSON.$G$1];[.$Y173];[$JSON.$H$1];[.$H173];[$JSON.$I$1];[.J173];[$JSON.$J$1];[.$L173];[$JSON.$K$1];[.$O173];[$JSON.$L$1];[.$N173];[$JSON.$M$1];[.$R173];[$JSON.$N$1];[.$T173];[$JSON.$O$1];IF(ISNA([.$V173]);&quot;null&quot;;[.$V173]);[$JSON.$P$1];[.$X173];[$JSON.$Q$1];[.$A173];[$JSON.$R$1];[.$B173];[$JSON.$S$1])" office:value-type="string" office:string-value="{&quot;id&quot;:&quot;2-40&quot;,&quot;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orderTable&quot;:172,&quot;orderDeck&quot;:17}," calcext:value-type="string">
            <text:p>{"id":"2-40","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G174];[$収録番号.$A$1:$収録番号.$B$9];2;0)" office:value-type="float" office:value="25" calcext:value-type="float">
            <text:p>25</text:p>
          </table:table-cell>
          <table:table-cell office:value-type="string" calcext:value-type="string">
            <text:p>N</text:p>
          </table:table-cell>
          <table:table-cell table:formula="of:=VLOOKUP([.I174];[$レアリティ番号.$A$1:$レアリティ番号.$B$4];2;0)" office:value-type="float" office:value="1" calcext:value-type="float">
            <text:p>1</text:p>
          </table:table-cell>
          <table:table-cell office:value-type="string" calcext:value-type="string">
            <text:p>イジン</text:p>
          </table:table-cell>
          <table:table-cell table:formula="of:=VLOOKUP([.K174];[$種類番号.$A$1:$種類番号.$B$4];2;0)" office:value-type="float" office:value="1" calcext:value-type="float">
            <text:p>1</text:p>
          </table:table-cell>
          <table:table-cell office:value-type="string" calcext:value-type="string">
            <text:p>黄</text:p>
          </table:table-cell>
          <table:table-cell table:formula="of:=VLOOKUP([.M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office:value-type="float" office:value="500" calcext:value-type="float">
            <text:p>500</text:p>
          </table:table-cell>
          <table:table-cell table:style-name="ce8" office:value-type="string" calcext:value-type="string">
            <text:p>反魂</text:p>
          </table:table-cell>
          <table:table-cell table:formula="of:=IFERROR(VLOOKUP([.$W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IF(ISNA([.$S174]);&quot;null&quot;;&quot;&quot;&quot;&quot;&amp;[.$S174]&amp;&quot;&quot;&quot;&quot;);[$JSON.$E$1];[.$U174];[$JSON.$F$1];IF(ISNA([.$W174]);&quot;null&quot;;&quot;&quot;&quot;&quot;&amp;[.$W174]&amp;&quot;&quot;&quot;&quot;);[$JSON.$G$1];[.$Y174];[$JSON.$H$1];[.$H174];[$JSON.$I$1];[.J174];[$JSON.$J$1];[.$L174];[$JSON.$K$1];[.$O174];[$JSON.$L$1];[.$N174];[$JSON.$M$1];[.$R174];[$JSON.$N$1];[.$T174];[$JSON.$O$1];IF(ISNA([.$V174]);&quot;null&quot;;[.$V174]);[$JSON.$P$1];[.$X174];[$JSON.$Q$1];[.$A174];[$JSON.$R$1];[.$B174];[$JSON.$S$1])" office:value-type="string" office:string-value="{&quot;id&quot;:&quot;2-41&quot;,&quot;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orderTable&quot;:173,&quot;orderDeck&quot;:18}," calcext:value-type="string">
            <text:p>{"id":"2-41","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G175];[$収録番号.$A$1:$収録番号.$B$9];2;0)" office:value-type="float" office:value="25" calcext:value-type="float">
            <text:p>25</text:p>
          </table:table-cell>
          <table:table-cell office:value-type="string" calcext:value-type="string">
            <text:p>R</text:p>
          </table:table-cell>
          <table:table-cell table:formula="of:=VLOOKUP([.I175];[$レアリティ番号.$A$1:$レアリティ番号.$B$4];2;0)" office:value-type="float" office:value="2" calcext:value-type="float">
            <text:p>2</text:p>
          </table:table-cell>
          <table:table-cell office:value-type="string" calcext:value-type="string">
            <text:p>イジン</text:p>
          </table:table-cell>
          <table:table-cell table:formula="of:=VLOOKUP([.K175];[$種類番号.$A$1:$種類番号.$B$4];2;0)" office:value-type="float" office:value="1" calcext:value-type="float">
            <text:p>1</text:p>
          </table:table-cell>
          <table:table-cell office:value-type="string" calcext:value-type="string">
            <text:p>黄</text:p>
          </table:table-cell>
          <table:table-cell table:formula="of:=VLOOKUP([.M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IF(ISNA([.$S175]);&quot;null&quot;;&quot;&quot;&quot;&quot;&amp;[.$S175]&amp;&quot;&quot;&quot;&quot;);[$JSON.$E$1];[.$U175];[$JSON.$F$1];IF(ISNA([.$W175]);&quot;null&quot;;&quot;&quot;&quot;&quot;&amp;[.$W175]&amp;&quot;&quot;&quot;&quot;);[$JSON.$G$1];[.$Y175];[$JSON.$H$1];[.$H175];[$JSON.$I$1];[.J175];[$JSON.$J$1];[.$L175];[$JSON.$K$1];[.$O175];[$JSON.$L$1];[.$N175];[$JSON.$M$1];[.$R175];[$JSON.$N$1];[.$T175];[$JSON.$O$1];IF(ISNA([.$V175]);&quot;null&quot;;[.$V175]);[$JSON.$P$1];[.$X175];[$JSON.$Q$1];[.$A175];[$JSON.$R$1];[.$B175];[$JSON.$S$1])" office:value-type="string" office:string-value="{&quot;id&quot;:&quot;2-42&quot;,&quot;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orderTable&quot;:174,&quot;orderDeck&quot;:95}," calcext:value-type="string">
            <text:p>{"id":"2-42","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G176];[$収録番号.$A$1:$収録番号.$B$9];2;0)" office:value-type="float" office:value="25" calcext:value-type="float">
            <text:p>25</text:p>
          </table:table-cell>
          <table:table-cell office:value-type="string" calcext:value-type="string">
            <text:p>N</text:p>
          </table:table-cell>
          <table:table-cell table:formula="of:=VLOOKUP([.I176];[$レアリティ番号.$A$1:$レアリティ番号.$B$4];2;0)" office:value-type="float" office:value="1" calcext:value-type="float">
            <text:p>1</text:p>
          </table:table-cell>
          <table:table-cell office:value-type="string" calcext:value-type="string">
            <text:p>イジン</text:p>
          </table:table-cell>
          <table:table-cell table:formula="of:=VLOOKUP([.K176];[$種類番号.$A$1:$種類番号.$B$4];2;0)" office:value-type="float" office:value="1" calcext:value-type="float">
            <text:p>1</text:p>
          </table:table-cell>
          <table:table-cell office:value-type="string" calcext:value-type="string">
            <text:p>黄</text:p>
          </table:table-cell>
          <table:table-cell table:formula="of:=VLOOKUP([.M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IF(ISNA([.$S176]);&quot;null&quot;;&quot;&quot;&quot;&quot;&amp;[.$S176]&amp;&quot;&quot;&quot;&quot;);[$JSON.$E$1];[.$U176];[$JSON.$F$1];IF(ISNA([.$W176]);&quot;null&quot;;&quot;&quot;&quot;&quot;&amp;[.$W176]&amp;&quot;&quot;&quot;&quot;);[$JSON.$G$1];[.$Y176];[$JSON.$H$1];[.$H176];[$JSON.$I$1];[.J176];[$JSON.$J$1];[.$L176];[$JSON.$K$1];[.$O176];[$JSON.$L$1];[.$N176];[$JSON.$M$1];[.$R176];[$JSON.$N$1];[.$T176];[$JSON.$O$1];IF(ISNA([.$V176]);&quot;null&quot;;[.$V176]);[$JSON.$P$1];[.$X176];[$JSON.$Q$1];[.$A176];[$JSON.$R$1];[.$B176];[$JSON.$S$1])" office:value-type="string" office:string-value="{&quot;id&quot;:&quot;2-43&quot;,&quot;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orderTable&quot;:175,&quot;orderDeck&quot;:96}," calcext:value-type="string">
            <text:p>{"id":"2-43","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G177];[$収録番号.$A$1:$収録番号.$B$9];2;0)" office:value-type="float" office:value="25" calcext:value-type="float">
            <text:p>25</text:p>
          </table:table-cell>
          <table:table-cell office:value-type="string" calcext:value-type="string">
            <text:p>N</text:p>
          </table:table-cell>
          <table:table-cell table:formula="of:=VLOOKUP([.I177];[$レアリティ番号.$A$1:$レアリティ番号.$B$4];2;0)" office:value-type="float" office:value="1" calcext:value-type="float">
            <text:p>1</text:p>
          </table:table-cell>
          <table:table-cell office:value-type="string" calcext:value-type="string">
            <text:p>イジン</text:p>
          </table:table-cell>
          <table:table-cell table:formula="of:=VLOOKUP([.K177];[$種類番号.$A$1:$種類番号.$B$4];2;0)" office:value-type="float" office:value="1" calcext:value-type="float">
            <text:p>1</text:p>
          </table:table-cell>
          <table:table-cell office:value-type="string" calcext:value-type="string">
            <text:p>黄</text:p>
          </table:table-cell>
          <table:table-cell table:formula="of:=VLOOKUP([.M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IF(ISNA([.$S177]);&quot;null&quot;;&quot;&quot;&quot;&quot;&amp;[.$S177]&amp;&quot;&quot;&quot;&quot;);[$JSON.$E$1];[.$U177];[$JSON.$F$1];IF(ISNA([.$W177]);&quot;null&quot;;&quot;&quot;&quot;&quot;&amp;[.$W177]&amp;&quot;&quot;&quot;&quot;);[$JSON.$G$1];[.$Y177];[$JSON.$H$1];[.$H177];[$JSON.$I$1];[.J177];[$JSON.$J$1];[.$L177];[$JSON.$K$1];[.$O177];[$JSON.$L$1];[.$N177];[$JSON.$M$1];[.$R177];[$JSON.$N$1];[.$T177];[$JSON.$O$1];IF(ISNA([.$V177]);&quot;null&quot;;[.$V177]);[$JSON.$P$1];[.$X177];[$JSON.$Q$1];[.$A177];[$JSON.$R$1];[.$B177];[$JSON.$S$1])" office:value-type="string" office:string-value="{&quot;id&quot;:&quot;2-44&quot;,&quot;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orderTable&quot;:176,&quot;orderDeck&quot;:135}," calcext:value-type="string">
            <text:p>{"id":"2-44","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G178];[$収録番号.$A$1:$収録番号.$B$9];2;0)" office:value-type="float" office:value="25" calcext:value-type="float">
            <text:p>25</text:p>
          </table:table-cell>
          <table:table-cell office:value-type="string" calcext:value-type="string">
            <text:p>R</text:p>
          </table:table-cell>
          <table:table-cell table:formula="of:=VLOOKUP([.I178];[$レアリティ番号.$A$1:$レアリティ番号.$B$4];2;0)" office:value-type="float" office:value="2" calcext:value-type="float">
            <text:p>2</text:p>
          </table:table-cell>
          <table:table-cell office:value-type="string" calcext:value-type="string">
            <text:p>イジン</text:p>
          </table:table-cell>
          <table:table-cell table:formula="of:=VLOOKUP([.K178];[$種類番号.$A$1:$種類番号.$B$4];2;0)" office:value-type="float" office:value="1" calcext:value-type="float">
            <text:p>1</text:p>
          </table:table-cell>
          <table:table-cell office:value-type="string" calcext:value-type="string">
            <text:p>黄</text:p>
          </table:table-cell>
          <table:table-cell table:formula="of:=VLOOKUP([.M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IF(ISNA([.$S178]);&quot;null&quot;;&quot;&quot;&quot;&quot;&amp;[.$S178]&amp;&quot;&quot;&quot;&quot;);[$JSON.$E$1];[.$U178];[$JSON.$F$1];IF(ISNA([.$W178]);&quot;null&quot;;&quot;&quot;&quot;&quot;&amp;[.$W178]&amp;&quot;&quot;&quot;&quot;);[$JSON.$G$1];[.$Y178];[$JSON.$H$1];[.$H178];[$JSON.$I$1];[.J178];[$JSON.$J$1];[.$L178];[$JSON.$K$1];[.$O178];[$JSON.$L$1];[.$N178];[$JSON.$M$1];[.$R178];[$JSON.$N$1];[.$T178];[$JSON.$O$1];IF(ISNA([.$V178]);&quot;null&quot;;[.$V178]);[$JSON.$P$1];[.$X178];[$JSON.$Q$1];[.$A178];[$JSON.$R$1];[.$B178];[$JSON.$S$1])" office:value-type="string" office:string-value="{&quot;id&quot;:&quot;2-45&quot;,&quot;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orderTable&quot;:177,&quot;orderDeck&quot;:55}," calcext:value-type="string">
            <text:p>{"id":"2-45","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G179];[$収録番号.$A$1:$収録番号.$B$9];2;0)" office:value-type="float" office:value="25" calcext:value-type="float">
            <text:p>25</text:p>
          </table:table-cell>
          <table:table-cell office:value-type="string" calcext:value-type="string">
            <text:p>N</text:p>
          </table:table-cell>
          <table:table-cell table:formula="of:=VLOOKUP([.I179];[$レアリティ番号.$A$1:$レアリティ番号.$B$4];2;0)" office:value-type="float" office:value="1" calcext:value-type="float">
            <text:p>1</text:p>
          </table:table-cell>
          <table:table-cell office:value-type="string" calcext:value-type="string">
            <text:p>イジン</text:p>
          </table:table-cell>
          <table:table-cell table:formula="of:=VLOOKUP([.K179];[$種類番号.$A$1:$種類番号.$B$4];2;0)" office:value-type="float" office:value="1" calcext:value-type="float">
            <text:p>1</text:p>
          </table:table-cell>
          <table:table-cell office:value-type="string" calcext:value-type="string">
            <text:p>黄</text:p>
          </table:table-cell>
          <table:table-cell table:formula="of:=VLOOKUP([.M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IF(ISNA([.$S179]);&quot;null&quot;;&quot;&quot;&quot;&quot;&amp;[.$S179]&amp;&quot;&quot;&quot;&quot;);[$JSON.$E$1];[.$U179];[$JSON.$F$1];IF(ISNA([.$W179]);&quot;null&quot;;&quot;&quot;&quot;&quot;&amp;[.$W179]&amp;&quot;&quot;&quot;&quot;);[$JSON.$G$1];[.$Y179];[$JSON.$H$1];[.$H179];[$JSON.$I$1];[.J179];[$JSON.$J$1];[.$L179];[$JSON.$K$1];[.$O179];[$JSON.$L$1];[.$N179];[$JSON.$M$1];[.$R179];[$JSON.$N$1];[.$T179];[$JSON.$O$1];IF(ISNA([.$V179]);&quot;null&quot;;[.$V179]);[$JSON.$P$1];[.$X179];[$JSON.$Q$1];[.$A179];[$JSON.$R$1];[.$B179];[$JSON.$S$1])" office:value-type="string" office:string-value="{&quot;id&quot;:&quot;2-46&quot;,&quot;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orderTable&quot;:178,&quot;orderDeck&quot;:136}," calcext:value-type="string">
            <text:p>{"id":"2-46","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G180];[$収録番号.$A$1:$収録番号.$B$9];2;0)" office:value-type="float" office:value="25" calcext:value-type="float">
            <text:p>25</text:p>
          </table:table-cell>
          <table:table-cell office:value-type="string" calcext:value-type="string">
            <text:p>N</text:p>
          </table:table-cell>
          <table:table-cell table:formula="of:=VLOOKUP([.I180];[$レアリティ番号.$A$1:$レアリティ番号.$B$4];2;0)" office:value-type="float" office:value="1" calcext:value-type="float">
            <text:p>1</text:p>
          </table:table-cell>
          <table:table-cell office:value-type="string" calcext:value-type="string">
            <text:p>イジン</text:p>
          </table:table-cell>
          <table:table-cell table:formula="of:=VLOOKUP([.K180];[$種類番号.$A$1:$種類番号.$B$4];2;0)" office:value-type="float" office:value="1" calcext:value-type="float">
            <text:p>1</text:p>
          </table:table-cell>
          <table:table-cell office:value-type="string" calcext:value-type="string">
            <text:p>黄</text:p>
          </table:table-cell>
          <table:table-cell table:formula="of:=VLOOKUP([.M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office:value-type="float" office:value="2000" calcext:value-type="float">
            <text:p>2000</text:p>
          </table:table-cell>
          <table:table-cell table:style-name="ce8" office:value-type="string" calcext:value-type="string">
            <text:p>山札の上か下に戻す</text:p>
          </table:table-cell>
          <table:table-cell table:formula="of:=IFERROR(VLOOKUP([.$W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IF(ISNA([.$S180]);&quot;null&quot;;&quot;&quot;&quot;&quot;&amp;[.$S180]&amp;&quot;&quot;&quot;&quot;);[$JSON.$E$1];[.$U180];[$JSON.$F$1];IF(ISNA([.$W180]);&quot;null&quot;;&quot;&quot;&quot;&quot;&amp;[.$W180]&amp;&quot;&quot;&quot;&quot;);[$JSON.$G$1];[.$Y180];[$JSON.$H$1];[.$H180];[$JSON.$I$1];[.J180];[$JSON.$J$1];[.$L180];[$JSON.$K$1];[.$O180];[$JSON.$L$1];[.$N180];[$JSON.$M$1];[.$R180];[$JSON.$N$1];[.$T180];[$JSON.$O$1];IF(ISNA([.$V180]);&quot;null&quot;;[.$V180]);[$JSON.$P$1];[.$X180];[$JSON.$Q$1];[.$A180];[$JSON.$R$1];[.$B180];[$JSON.$S$1])" office:value-type="string" office:string-value="{&quot;id&quot;:&quot;2-47&quot;,&quot;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orderTable&quot;:179,&quot;orderDeck&quot;:97}," calcext:value-type="string">
            <text:p>{"id":"2-47","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G181];[$収録番号.$A$1:$収録番号.$B$9];2;0)" office:value-type="float" office:value="25" calcext:value-type="float">
            <text:p>25</text:p>
          </table:table-cell>
          <table:table-cell office:value-type="string" calcext:value-type="string">
            <text:p>N</text:p>
          </table:table-cell>
          <table:table-cell table:formula="of:=VLOOKUP([.I181];[$レアリティ番号.$A$1:$レアリティ番号.$B$4];2;0)" office:value-type="float" office:value="1" calcext:value-type="float">
            <text:p>1</text:p>
          </table:table-cell>
          <table:table-cell office:value-type="string" calcext:value-type="string">
            <text:p>イジン</text:p>
          </table:table-cell>
          <table:table-cell table:formula="of:=VLOOKUP([.K181];[$種類番号.$A$1:$種類番号.$B$4];2;0)" office:value-type="float" office:value="1" calcext:value-type="float">
            <text:p>1</text:p>
          </table:table-cell>
          <table:table-cell office:value-type="string" calcext:value-type="string">
            <text:p>黄</text:p>
          </table:table-cell>
          <table:table-cell table:formula="of:=VLOOKUP([.M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office:value-type="float" office:value="5000" calcext:value-type="float">
            <text:p>5000</text:p>
          </table:table-cell>
          <table:table-cell table:style-name="ce8" office:value-type="string" calcext:value-type="string">
            <text:p>山札の上か下に戻す</text:p>
          </table:table-cell>
          <table:table-cell table:formula="of:=IFERROR(VLOOKUP([.$W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IF(ISNA([.$S181]);&quot;null&quot;;&quot;&quot;&quot;&quot;&amp;[.$S181]&amp;&quot;&quot;&quot;&quot;);[$JSON.$E$1];[.$U181];[$JSON.$F$1];IF(ISNA([.$W181]);&quot;null&quot;;&quot;&quot;&quot;&quot;&amp;[.$W181]&amp;&quot;&quot;&quot;&quot;);[$JSON.$G$1];[.$Y181];[$JSON.$H$1];[.$H181];[$JSON.$I$1];[.J181];[$JSON.$J$1];[.$L181];[$JSON.$K$1];[.$O181];[$JSON.$L$1];[.$N181];[$JSON.$M$1];[.$R181];[$JSON.$N$1];[.$T181];[$JSON.$O$1];IF(ISNA([.$V181]);&quot;null&quot;;[.$V181]);[$JSON.$P$1];[.$X181];[$JSON.$Q$1];[.$A181];[$JSON.$R$1];[.$B181];[$JSON.$S$1])" office:value-type="string" office:string-value="{&quot;id&quot;:&quot;2-48&quot;,&quot;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orderTable&quot;:180,&quot;orderDeck&quot;:173}," calcext:value-type="string">
            <text:p>{"id":"2-48","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G182];[$収録番号.$A$1:$収録番号.$B$9];2;0)" office:value-type="float" office:value="25" calcext:value-type="float">
            <text:p>25</text:p>
          </table:table-cell>
          <table:table-cell office:value-type="string" calcext:value-type="string">
            <text:p>N</text:p>
          </table:table-cell>
          <table:table-cell table:formula="of:=VLOOKUP([.I182];[$レアリティ番号.$A$1:$レアリティ番号.$B$4];2;0)" office:value-type="float" office:value="1" calcext:value-type="float">
            <text:p>1</text:p>
          </table:table-cell>
          <table:table-cell office:value-type="string" calcext:value-type="string">
            <text:p>ハイケイ</text:p>
          </table:table-cell>
          <table:table-cell table:formula="of:=VLOOKUP([.K182];[$種類番号.$A$1:$種類番号.$B$4];2;0)" office:value-type="float" office:value="2" calcext:value-type="float">
            <text:p>2</text:p>
          </table:table-cell>
          <table:table-cell office:value-type="string" calcext:value-type="string">
            <text:p>赤</text:p>
          </table:table-cell>
          <table:table-cell table:formula="of:=VLOOKUP([.M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Q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IF(ISNA([.$S182]);&quot;null&quot;;&quot;&quot;&quot;&quot;&amp;[.$S182]&amp;&quot;&quot;&quot;&quot;);[$JSON.$E$1];[.$U182];[$JSON.$F$1];IF(ISNA([.$W182]);&quot;null&quot;;&quot;&quot;&quot;&quot;&amp;[.$W182]&amp;&quot;&quot;&quot;&quot;);[$JSON.$G$1];[.$Y182];[$JSON.$H$1];[.$H182];[$JSON.$I$1];[.J182];[$JSON.$J$1];[.$L182];[$JSON.$K$1];[.$O182];[$JSON.$L$1];[.$N182];[$JSON.$M$1];[.$R182];[$JSON.$N$1];[.$T182];[$JSON.$O$1];IF(ISNA([.$V182]);&quot;null&quot;;[.$V182]);[$JSON.$P$1];[.$X182];[$JSON.$Q$1];[.$A182];[$JSON.$R$1];[.$B182];[$JSON.$S$1])" office:value-type="string" office:string-value="{&quot;id&quot;:&quot;2-49&quot;,&quot;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orderTable&quot;:181,&quot;orderDeck&quot;:240}," calcext:value-type="string">
            <text:p>{"id":"2-49","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G183];[$収録番号.$A$1:$収録番号.$B$9];2;0)" office:value-type="float" office:value="25" calcext:value-type="float">
            <text:p>25</text:p>
          </table:table-cell>
          <table:table-cell office:value-type="string" calcext:value-type="string">
            <text:p>N</text:p>
          </table:table-cell>
          <table:table-cell table:formula="of:=VLOOKUP([.I183];[$レアリティ番号.$A$1:$レアリティ番号.$B$4];2;0)" office:value-type="float" office:value="1" calcext:value-type="float">
            <text:p>1</text:p>
          </table:table-cell>
          <table:table-cell office:value-type="string" calcext:value-type="string">
            <text:p>ハイケイ</text:p>
          </table:table-cell>
          <table:table-cell table:formula="of:=VLOOKUP([.K183];[$種類番号.$A$1:$種類番号.$B$4];2;0)" office:value-type="float" office:value="2" calcext:value-type="float">
            <text:p>2</text:p>
          </table:table-cell>
          <table:table-cell office:value-type="string" calcext:value-type="string">
            <text:p>赤</text:p>
          </table:table-cell>
          <table:table-cell table:formula="of:=VLOOKUP([.M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IF(ISNA([.$S183]);&quot;null&quot;;&quot;&quot;&quot;&quot;&amp;[.$S183]&amp;&quot;&quot;&quot;&quot;);[$JSON.$E$1];[.$U183];[$JSON.$F$1];IF(ISNA([.$W183]);&quot;null&quot;;&quot;&quot;&quot;&quot;&amp;[.$W183]&amp;&quot;&quot;&quot;&quot;);[$JSON.$G$1];[.$Y183];[$JSON.$H$1];[.$H183];[$JSON.$I$1];[.J183];[$JSON.$J$1];[.$L183];[$JSON.$K$1];[.$O183];[$JSON.$L$1];[.$N183];[$JSON.$M$1];[.$R183];[$JSON.$N$1];[.$T183];[$JSON.$O$1];IF(ISNA([.$V183]);&quot;null&quot;;[.$V183]);[$JSON.$P$1];[.$X183];[$JSON.$Q$1];[.$A183];[$JSON.$R$1];[.$B183];[$JSON.$S$1])" office:value-type="string" office:string-value="{&quot;id&quot;:&quot;2-50&quot;,&quot;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orderTable&quot;:182,&quot;orderDeck&quot;:266}," calcext:value-type="string">
            <text:p>{"id":"2-50","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G184];[$収録番号.$A$1:$収録番号.$B$9];2;0)" office:value-type="float" office:value="25" calcext:value-type="float">
            <text:p>25</text:p>
          </table:table-cell>
          <table:table-cell office:value-type="string" calcext:value-type="string">
            <text:p>N</text:p>
          </table:table-cell>
          <table:table-cell table:formula="of:=VLOOKUP([.I184];[$レアリティ番号.$A$1:$レアリティ番号.$B$4];2;0)" office:value-type="float" office:value="1" calcext:value-type="float">
            <text:p>1</text:p>
          </table:table-cell>
          <table:table-cell office:value-type="string" calcext:value-type="string">
            <text:p>ハイケイ</text:p>
          </table:table-cell>
          <table:table-cell table:formula="of:=VLOOKUP([.K184];[$種類番号.$A$1:$種類番号.$B$4];2;0)" office:value-type="float" office:value="2" calcext:value-type="float">
            <text:p>2</text:p>
          </table:table-cell>
          <table:table-cell office:value-type="string" calcext:value-type="string">
            <text:p>青</text:p>
          </table:table-cell>
          <table:table-cell table:formula="of:=VLOOKUP([.M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4];[$能力語番号.$A$1:$能力語番号.$B$10];2;0);0)" office:value-type="float" office:value="0" calcext:value-type="float">
            <text:p>0</text:p>
          </table:table-cell>
          <table:table-cell office:value-type="string" calcext:value-type="string">
            <text:p>思想</text:p>
          </table:table-cell>
          <table:table-cell table:formula="of:=IFERROR(VLOOKUP([.$S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IF(ISNA([.$S184]);&quot;null&quot;;&quot;&quot;&quot;&quot;&amp;[.$S184]&amp;&quot;&quot;&quot;&quot;);[$JSON.$E$1];[.$U184];[$JSON.$F$1];IF(ISNA([.$W184]);&quot;null&quot;;&quot;&quot;&quot;&quot;&amp;[.$W184]&amp;&quot;&quot;&quot;&quot;);[$JSON.$G$1];[.$Y184];[$JSON.$H$1];[.$H184];[$JSON.$I$1];[.J184];[$JSON.$J$1];[.$L184];[$JSON.$K$1];[.$O184];[$JSON.$L$1];[.$N184];[$JSON.$M$1];[.$R184];[$JSON.$N$1];[.$T184];[$JSON.$O$1];IF(ISNA([.$V184]);&quot;null&quot;;[.$V184]);[$JSON.$P$1];[.$X184];[$JSON.$Q$1];[.$A184];[$JSON.$R$1];[.$B184];[$JSON.$S$1])" office:value-type="string" office:string-value="{&quot;id&quot;:&quot;2-51&quot;,&quot;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orderTable&quot;:183,&quot;orderDeck&quot;:261}," calcext:value-type="string">
            <text:p>{"id":"2-51","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G185];[$収録番号.$A$1:$収録番号.$B$9];2;0)" office:value-type="float" office:value="25" calcext:value-type="float">
            <text:p>25</text:p>
          </table:table-cell>
          <table:table-cell office:value-type="string" calcext:value-type="string">
            <text:p>N</text:p>
          </table:table-cell>
          <table:table-cell table:formula="of:=VLOOKUP([.I185];[$レアリティ番号.$A$1:$レアリティ番号.$B$4];2;0)" office:value-type="float" office:value="1" calcext:value-type="float">
            <text:p>1</text:p>
          </table:table-cell>
          <table:table-cell office:value-type="string" calcext:value-type="string">
            <text:p>ハイケイ</text:p>
          </table:table-cell>
          <table:table-cell table:formula="of:=VLOOKUP([.K185];[$種類番号.$A$1:$種類番号.$B$4];2;0)" office:value-type="float" office:value="2" calcext:value-type="float">
            <text:p>2</text:p>
          </table:table-cell>
          <table:table-cell office:value-type="string" calcext:value-type="string">
            <text:p>青</text:p>
          </table:table-cell>
          <table:table-cell table:formula="of:=VLOOKUP([.M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IF(ISNA([.$S185]);&quot;null&quot;;&quot;&quot;&quot;&quot;&amp;[.$S185]&amp;&quot;&quot;&quot;&quot;);[$JSON.$E$1];[.$U185];[$JSON.$F$1];IF(ISNA([.$W185]);&quot;null&quot;;&quot;&quot;&quot;&quot;&amp;[.$W185]&amp;&quot;&quot;&quot;&quot;);[$JSON.$G$1];[.$Y185];[$JSON.$H$1];[.$H185];[$JSON.$I$1];[.J185];[$JSON.$J$1];[.$L185];[$JSON.$K$1];[.$O185];[$JSON.$L$1];[.$N185];[$JSON.$M$1];[.$R185];[$JSON.$N$1];[.$T185];[$JSON.$O$1];IF(ISNA([.$V185]);&quot;null&quot;;[.$V185]);[$JSON.$P$1];[.$X185];[$JSON.$Q$1];[.$A185];[$JSON.$R$1];[.$B185];[$JSON.$S$1])" office:value-type="string" office:string-value="{&quot;id&quot;:&quot;2-52&quot;,&quot;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orderTable&quot;:184,&quot;orderDeck&quot;:274}," calcext:value-type="string">
            <text:p>{"id":"2-52","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G186];[$収録番号.$A$1:$収録番号.$B$9];2;0)" office:value-type="float" office:value="25" calcext:value-type="float">
            <text:p>25</text:p>
          </table:table-cell>
          <table:table-cell office:value-type="string" calcext:value-type="string">
            <text:p>N</text:p>
          </table:table-cell>
          <table:table-cell table:formula="of:=VLOOKUP([.I186];[$レアリティ番号.$A$1:$レアリティ番号.$B$4];2;0)" office:value-type="float" office:value="1" calcext:value-type="float">
            <text:p>1</text:p>
          </table:table-cell>
          <table:table-cell office:value-type="string" calcext:value-type="string">
            <text:p>ハイケイ</text:p>
          </table:table-cell>
          <table:table-cell table:formula="of:=VLOOKUP([.K186];[$種類番号.$A$1:$種類番号.$B$4];2;0)" office:value-type="float" office:value="2" calcext:value-type="float">
            <text:p>2</text:p>
          </table:table-cell>
          <table:table-cell office:value-type="string" calcext:value-type="string">
            <text:p>緑</text:p>
          </table:table-cell>
          <table:table-cell table:formula="of:=VLOOKUP([.M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IF(ISNA([.$S186]);&quot;null&quot;;&quot;&quot;&quot;&quot;&amp;[.$S186]&amp;&quot;&quot;&quot;&quot;);[$JSON.$E$1];[.$U186];[$JSON.$F$1];IF(ISNA([.$W186]);&quot;null&quot;;&quot;&quot;&quot;&quot;&amp;[.$W186]&amp;&quot;&quot;&quot;&quot;);[$JSON.$G$1];[.$Y186];[$JSON.$H$1];[.$H186];[$JSON.$I$1];[.J186];[$JSON.$J$1];[.$L186];[$JSON.$K$1];[.$O186];[$JSON.$L$1];[.$N186];[$JSON.$M$1];[.$R186];[$JSON.$N$1];[.$T186];[$JSON.$O$1];IF(ISNA([.$V186]);&quot;null&quot;;[.$V186]);[$JSON.$P$1];[.$X186];[$JSON.$Q$1];[.$A186];[$JSON.$R$1];[.$B186];[$JSON.$S$1])" office:value-type="string" office:string-value="{&quot;id&quot;:&quot;2-53&quot;,&quot;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orderTable&quot;:185,&quot;orderDeck&quot;:244}," calcext:value-type="string">
            <text:p>{"id":"2-53","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G187];[$収録番号.$A$1:$収録番号.$B$9];2;0)" office:value-type="float" office:value="25" calcext:value-type="float">
            <text:p>25</text:p>
          </table:table-cell>
          <table:table-cell office:value-type="string" calcext:value-type="string">
            <text:p>N</text:p>
          </table:table-cell>
          <table:table-cell table:formula="of:=VLOOKUP([.I187];[$レアリティ番号.$A$1:$レアリティ番号.$B$4];2;0)" office:value-type="float" office:value="1" calcext:value-type="float">
            <text:p>1</text:p>
          </table:table-cell>
          <table:table-cell office:value-type="string" calcext:value-type="string">
            <text:p>ハイケイ</text:p>
          </table:table-cell>
          <table:table-cell table:formula="of:=VLOOKUP([.K187];[$種類番号.$A$1:$種類番号.$B$4];2;0)" office:value-type="float" office:value="2" calcext:value-type="float">
            <text:p>2</text:p>
          </table:table-cell>
          <table:table-cell office:value-type="string" calcext:value-type="string">
            <text:p>緑</text:p>
          </table:table-cell>
          <table:table-cell table:formula="of:=VLOOKUP([.M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IF(ISNA([.$S187]);&quot;null&quot;;&quot;&quot;&quot;&quot;&amp;[.$S187]&amp;&quot;&quot;&quot;&quot;);[$JSON.$E$1];[.$U187];[$JSON.$F$1];IF(ISNA([.$W187]);&quot;null&quot;;&quot;&quot;&quot;&quot;&amp;[.$W187]&amp;&quot;&quot;&quot;&quot;);[$JSON.$G$1];[.$Y187];[$JSON.$H$1];[.$H187];[$JSON.$I$1];[.J187];[$JSON.$J$1];[.$L187];[$JSON.$K$1];[.$O187];[$JSON.$L$1];[.$N187];[$JSON.$M$1];[.$R187];[$JSON.$N$1];[.$T187];[$JSON.$O$1];IF(ISNA([.$V187]);&quot;null&quot;;[.$V187]);[$JSON.$P$1];[.$X187];[$JSON.$Q$1];[.$A187];[$JSON.$R$1];[.$B187];[$JSON.$S$1])" office:value-type="string" office:string-value="{&quot;id&quot;:&quot;2-54&quot;,&quot;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orderTable&quot;:186,&quot;orderDeck&quot;:279}," calcext:value-type="string">
            <text:p>{"id":"2-54","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G188];[$収録番号.$A$1:$収録番号.$B$9];2;0)" office:value-type="float" office:value="25" calcext:value-type="float">
            <text:p>25</text:p>
          </table:table-cell>
          <table:table-cell office:value-type="string" calcext:value-type="string">
            <text:p>N</text:p>
          </table:table-cell>
          <table:table-cell table:formula="of:=VLOOKUP([.I188];[$レアリティ番号.$A$1:$レアリティ番号.$B$4];2;0)" office:value-type="float" office:value="1" calcext:value-type="float">
            <text:p>1</text:p>
          </table:table-cell>
          <table:table-cell office:value-type="string" calcext:value-type="string">
            <text:p>ハイケイ</text:p>
          </table:table-cell>
          <table:table-cell table:formula="of:=VLOOKUP([.K188];[$種類番号.$A$1:$種類番号.$B$4];2;0)" office:value-type="float" office:value="2" calcext:value-type="float">
            <text:p>2</text:p>
          </table:table-cell>
          <table:table-cell office:value-type="string" calcext:value-type="string">
            <text:p>黄</text:p>
          </table:table-cell>
          <table:table-cell table:formula="of:=VLOOKUP([.M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IF(ISNA([.$S188]);&quot;null&quot;;&quot;&quot;&quot;&quot;&amp;[.$S188]&amp;&quot;&quot;&quot;&quot;);[$JSON.$E$1];[.$U188];[$JSON.$F$1];IF(ISNA([.$W188]);&quot;null&quot;;&quot;&quot;&quot;&quot;&amp;[.$W188]&amp;&quot;&quot;&quot;&quot;);[$JSON.$G$1];[.$Y188];[$JSON.$H$1];[.$H188];[$JSON.$I$1];[.J188];[$JSON.$J$1];[.$L188];[$JSON.$K$1];[.$O188];[$JSON.$L$1];[.$N188];[$JSON.$M$1];[.$R188];[$JSON.$N$1];[.$T188];[$JSON.$O$1];IF(ISNA([.$V188]);&quot;null&quot;;[.$V188]);[$JSON.$P$1];[.$X188];[$JSON.$Q$1];[.$A188];[$JSON.$R$1];[.$B188];[$JSON.$S$1])" office:value-type="string" office:string-value="{&quot;id&quot;:&quot;2-55&quot;,&quot;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orderTable&quot;:187,&quot;orderDeck&quot;:246}," calcext:value-type="string">
            <text:p>{"id":"2-55","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G189];[$収録番号.$A$1:$収録番号.$B$9];2;0)" office:value-type="float" office:value="25" calcext:value-type="float">
            <text:p>25</text:p>
          </table:table-cell>
          <table:table-cell office:value-type="string" calcext:value-type="string">
            <text:p>N</text:p>
          </table:table-cell>
          <table:table-cell table:formula="of:=VLOOKUP([.I189];[$レアリティ番号.$A$1:$レアリティ番号.$B$4];2;0)" office:value-type="float" office:value="1" calcext:value-type="float">
            <text:p>1</text:p>
          </table:table-cell>
          <table:table-cell office:value-type="string" calcext:value-type="string">
            <text:p>ハイケイ</text:p>
          </table:table-cell>
          <table:table-cell table:formula="of:=VLOOKUP([.K189];[$種類番号.$A$1:$種類番号.$B$4];2;0)" office:value-type="float" office:value="2" calcext:value-type="float">
            <text:p>2</text:p>
          </table:table-cell>
          <table:table-cell office:value-type="string" calcext:value-type="string">
            <text:p>黄</text:p>
          </table:table-cell>
          <table:table-cell table:formula="of:=VLOOKUP([.M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IF(ISNA([.$S189]);&quot;null&quot;;&quot;&quot;&quot;&quot;&amp;[.$S189]&amp;&quot;&quot;&quot;&quot;);[$JSON.$E$1];[.$U189];[$JSON.$F$1];IF(ISNA([.$W189]);&quot;null&quot;;&quot;&quot;&quot;&quot;&amp;[.$W189]&amp;&quot;&quot;&quot;&quot;);[$JSON.$G$1];[.$Y189];[$JSON.$H$1];[.$H189];[$JSON.$I$1];[.J189];[$JSON.$J$1];[.$L189];[$JSON.$K$1];[.$O189];[$JSON.$L$1];[.$N189];[$JSON.$M$1];[.$R189];[$JSON.$N$1];[.$T189];[$JSON.$O$1];IF(ISNA([.$V189]);&quot;null&quot;;[.$V189]);[$JSON.$P$1];[.$X189];[$JSON.$Q$1];[.$A189];[$JSON.$R$1];[.$B189];[$JSON.$S$1])" office:value-type="string" office:string-value="{&quot;id&quot;:&quot;2-56&quot;,&quot;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orderTable&quot;:188,&quot;orderDeck&quot;:256}," calcext:value-type="string">
            <text:p>{"id":"2-56","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G190];[$収録番号.$A$1:$収録番号.$B$9];2;0)" office:value-type="float" office:value="25" calcext:value-type="float">
            <text:p>25</text:p>
          </table:table-cell>
          <table:table-cell office:value-type="string" calcext:value-type="string">
            <text:p>N</text:p>
          </table:table-cell>
          <table:table-cell table:formula="of:=VLOOKUP([.I190];[$レアリティ番号.$A$1:$レアリティ番号.$B$4];2;0)" office:value-type="float" office:value="1" calcext:value-type="float">
            <text:p>1</text:p>
          </table:table-cell>
          <table:table-cell office:value-type="string" calcext:value-type="string">
            <text:p>マホウ</text:p>
          </table:table-cell>
          <table:table-cell table:formula="of:=VLOOKUP([.K190];[$種類番号.$A$1:$種類番号.$B$4];2;0)" office:value-type="float" office:value="3" calcext:value-type="float">
            <text:p>3</text:p>
          </table:table-cell>
          <table:table-cell office:value-type="string" calcext:value-type="string">
            <text:p>赤</text:p>
          </table:table-cell>
          <table:table-cell table:formula="of:=VLOOKUP([.M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Q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IF(ISNA([.$S190]);&quot;null&quot;;&quot;&quot;&quot;&quot;&amp;[.$S190]&amp;&quot;&quot;&quot;&quot;);[$JSON.$E$1];[.$U190];[$JSON.$F$1];IF(ISNA([.$W190]);&quot;null&quot;;&quot;&quot;&quot;&quot;&amp;[.$W190]&amp;&quot;&quot;&quot;&quot;);[$JSON.$G$1];[.$Y190];[$JSON.$H$1];[.$H190];[$JSON.$I$1];[.J190];[$JSON.$J$1];[.$L190];[$JSON.$K$1];[.$O190];[$JSON.$L$1];[.$N190];[$JSON.$M$1];[.$R190];[$JSON.$N$1];[.$T190];[$JSON.$O$1];IF(ISNA([.$V190]);&quot;null&quot;;[.$V190]);[$JSON.$P$1];[.$X190];[$JSON.$Q$1];[.$A190];[$JSON.$R$1];[.$B190];[$JSON.$S$1])" office:value-type="string" office:string-value="{&quot;id&quot;:&quot;2-57&quot;,&quot;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orderTable&quot;:189,&quot;orderDeck&quot;:334}," calcext:value-type="string">
            <text:p>{"id":"2-57","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G191];[$収録番号.$A$1:$収録番号.$B$9];2;0)" office:value-type="float" office:value="25" calcext:value-type="float">
            <text:p>25</text:p>
          </table:table-cell>
          <table:table-cell office:value-type="string" calcext:value-type="string">
            <text:p>N</text:p>
          </table:table-cell>
          <table:table-cell table:formula="of:=VLOOKUP([.I191];[$レアリティ番号.$A$1:$レアリティ番号.$B$4];2;0)" office:value-type="float" office:value="1" calcext:value-type="float">
            <text:p>1</text:p>
          </table:table-cell>
          <table:table-cell office:value-type="string" calcext:value-type="string">
            <text:p>マホウ</text:p>
          </table:table-cell>
          <table:table-cell table:formula="of:=VLOOKUP([.K191];[$種類番号.$A$1:$種類番号.$B$4];2;0)" office:value-type="float" office:value="3" calcext:value-type="float">
            <text:p>3</text:p>
          </table:table-cell>
          <table:table-cell office:value-type="string" calcext:value-type="string">
            <text:p>赤</text:p>
          </table:table-cell>
          <table:table-cell table:formula="of:=VLOOKUP([.M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IF(ISNA([.$S191]);&quot;null&quot;;&quot;&quot;&quot;&quot;&amp;[.$S191]&amp;&quot;&quot;&quot;&quot;);[$JSON.$E$1];[.$U191];[$JSON.$F$1];IF(ISNA([.$W191]);&quot;null&quot;;&quot;&quot;&quot;&quot;&amp;[.$W191]&amp;&quot;&quot;&quot;&quot;);[$JSON.$G$1];[.$Y191];[$JSON.$H$1];[.$H191];[$JSON.$I$1];[.J191];[$JSON.$J$1];[.$L191];[$JSON.$K$1];[.$O191];[$JSON.$L$1];[.$N191];[$JSON.$M$1];[.$R191];[$JSON.$N$1];[.$T191];[$JSON.$O$1];IF(ISNA([.$V191]);&quot;null&quot;;[.$V191]);[$JSON.$P$1];[.$X191];[$JSON.$Q$1];[.$A191];[$JSON.$R$1];[.$B191];[$JSON.$S$1])" office:value-type="string" office:string-value="{&quot;id&quot;:&quot;2-58&quot;,&quot;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orderTable&quot;:190,&quot;orderDeck&quot;:292}," calcext:value-type="string">
            <text:p>{"id":"2-58","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G192];[$収録番号.$A$1:$収録番号.$B$9];2;0)" office:value-type="float" office:value="25" calcext:value-type="float">
            <text:p>25</text:p>
          </table:table-cell>
          <table:table-cell office:value-type="string" calcext:value-type="string">
            <text:p>N</text:p>
          </table:table-cell>
          <table:table-cell table:formula="of:=VLOOKUP([.I192];[$レアリティ番号.$A$1:$レアリティ番号.$B$4];2;0)" office:value-type="float" office:value="1" calcext:value-type="float">
            <text:p>1</text:p>
          </table:table-cell>
          <table:table-cell office:value-type="string" calcext:value-type="string">
            <text:p>マホウ</text:p>
          </table:table-cell>
          <table:table-cell table:formula="of:=VLOOKUP([.K192];[$種類番号.$A$1:$種類番号.$B$4];2;0)" office:value-type="float" office:value="3" calcext:value-type="float">
            <text:p>3</text:p>
          </table:table-cell>
          <table:table-cell office:value-type="string" calcext:value-type="string">
            <text:p>赤</text:p>
          </table:table-cell>
          <table:table-cell table:formula="of:=VLOOKUP([.M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2];[$特性番号.$A$1:$特性番号.$B$8];2;0);0)" office:value-type="float" office:value="0" calcext:value-type="float">
            <text:p>0</text:p>
          </table:table-cell>
          <table:table-cell office:value-type="string" calcext:value-type="string">
            <text:p>イジン召喚権+1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IF(ISNA([.$S192]);&quot;null&quot;;&quot;&quot;&quot;&quot;&amp;[.$S192]&amp;&quot;&quot;&quot;&quot;);[$JSON.$E$1];[.$U192];[$JSON.$F$1];IF(ISNA([.$W192]);&quot;null&quot;;&quot;&quot;&quot;&quot;&amp;[.$W192]&amp;&quot;&quot;&quot;&quot;);[$JSON.$G$1];[.$Y192];[$JSON.$H$1];[.$H192];[$JSON.$I$1];[.J192];[$JSON.$J$1];[.$L192];[$JSON.$K$1];[.$O192];[$JSON.$L$1];[.$N192];[$JSON.$M$1];[.$R192];[$JSON.$N$1];[.$T192];[$JSON.$O$1];IF(ISNA([.$V192]);&quot;null&quot;;[.$V192]);[$JSON.$P$1];[.$X192];[$JSON.$Q$1];[.$A192];[$JSON.$R$1];[.$B192];[$JSON.$S$1])" office:value-type="string" office:string-value="{&quot;id&quot;:&quot;2-59&quot;,&quot;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orderTable&quot;:191,&quot;orderDeck&quot;:306}," calcext:value-type="string">
            <text:p>{"id":"2-59","name":"サモン","kana":"さもん","traitText":null,"ruleText":"イジン召喚権+1する。","legacyText":"手札に戻す","imageUrl":"https://one-draw.jp/ijinden/cardlist/002/card/02_059.png","expansion":25,"rarity":1,"type":3,"level":3,"color":1,"term":0,"trait":0,"power":null,"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G193];[$収録番号.$A$1:$収録番号.$B$9];2;0)" office:value-type="float" office:value="25" calcext:value-type="float">
            <text:p>25</text:p>
          </table:table-cell>
          <table:table-cell office:value-type="string" calcext:value-type="string">
            <text:p>N</text:p>
          </table:table-cell>
          <table:table-cell table:formula="of:=VLOOKUP([.I193];[$レアリティ番号.$A$1:$レアリティ番号.$B$4];2;0)" office:value-type="float" office:value="1" calcext:value-type="float">
            <text:p>1</text:p>
          </table:table-cell>
          <table:table-cell office:value-type="string" calcext:value-type="string">
            <text:p>マホウ</text:p>
          </table:table-cell>
          <table:table-cell table:formula="of:=VLOOKUP([.K193];[$種類番号.$A$1:$種類番号.$B$4];2;0)" office:value-type="float" office:value="3" calcext:value-type="float">
            <text:p>3</text:p>
          </table:table-cell>
          <table:table-cell office:value-type="string" calcext:value-type="string">
            <text:p>青</text:p>
          </table:table-cell>
          <table:table-cell table:formula="of:=VLOOKUP([.M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IF(ISNA([.$S193]);&quot;null&quot;;&quot;&quot;&quot;&quot;&amp;[.$S193]&amp;&quot;&quot;&quot;&quot;);[$JSON.$E$1];[.$U193];[$JSON.$F$1];IF(ISNA([.$W193]);&quot;null&quot;;&quot;&quot;&quot;&quot;&amp;[.$W193]&amp;&quot;&quot;&quot;&quot;);[$JSON.$G$1];[.$Y193];[$JSON.$H$1];[.$H193];[$JSON.$I$1];[.J193];[$JSON.$J$1];[.$L193];[$JSON.$K$1];[.$O193];[$JSON.$L$1];[.$N193];[$JSON.$M$1];[.$R193];[$JSON.$N$1];[.$T193];[$JSON.$O$1];IF(ISNA([.$V193]);&quot;null&quot;;[.$V193]);[$JSON.$P$1];[.$X193];[$JSON.$Q$1];[.$A193];[$JSON.$R$1];[.$B193];[$JSON.$S$1])" office:value-type="string" office:string-value="{&quot;id&quot;:&quot;2-60&quot;,&quot;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orderTable&quot;:192,&quot;orderDeck&quot;:295}," calcext:value-type="string">
            <text:p>{"id":"2-60","name":"フェイス","kana":"ふぇいす","traitText":null,"ruleText":"自分の山札の上から1枚をガーディアンにして戦場に置く。","legacyText":"手札に戻す","imageUrl":"https://one-draw.jp/ijinden/cardlist/002/card/02_060.png","expansion":25,"rarity":1,"type":3,"level":2,"color":2,"term":0,"trait":0,"power":null,"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G194];[$収録番号.$A$1:$収録番号.$B$9];2;0)" office:value-type="float" office:value="25" calcext:value-type="float">
            <text:p>25</text:p>
          </table:table-cell>
          <table:table-cell office:value-type="string" calcext:value-type="string">
            <text:p>N</text:p>
          </table:table-cell>
          <table:table-cell table:formula="of:=VLOOKUP([.I194];[$レアリティ番号.$A$1:$レアリティ番号.$B$4];2;0)" office:value-type="float" office:value="1" calcext:value-type="float">
            <text:p>1</text:p>
          </table:table-cell>
          <table:table-cell office:value-type="string" calcext:value-type="string">
            <text:p>マホウ</text:p>
          </table:table-cell>
          <table:table-cell table:formula="of:=VLOOKUP([.K194];[$種類番号.$A$1:$種類番号.$B$4];2;0)" office:value-type="float" office:value="3" calcext:value-type="float">
            <text:p>3</text:p>
          </table:table-cell>
          <table:table-cell office:value-type="string" calcext:value-type="string">
            <text:p>青</text:p>
          </table:table-cell>
          <table:table-cell table:formula="of:=VLOOKUP([.M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4];[$特性番号.$A$1:$特性番号.$B$8];2;0);0)" office:value-type="float" office:value="0" calcext:value-type="float">
            <text:p>0</text:p>
          </table:table-cell>
          <table:table-cell office:value-type="string" calcext:value-type="string">
            <text:p>2ドローして、自分の手札1枚を墓地に置く。</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IF(ISNA([.$S194]);&quot;null&quot;;&quot;&quot;&quot;&quot;&amp;[.$S194]&amp;&quot;&quot;&quot;&quot;);[$JSON.$E$1];[.$U194];[$JSON.$F$1];IF(ISNA([.$W194]);&quot;null&quot;;&quot;&quot;&quot;&quot;&amp;[.$W194]&amp;&quot;&quot;&quot;&quot;);[$JSON.$G$1];[.$Y194];[$JSON.$H$1];[.$H194];[$JSON.$I$1];[.J194];[$JSON.$J$1];[.$L194];[$JSON.$K$1];[.$O194];[$JSON.$L$1];[.$N194];[$JSON.$M$1];[.$R194];[$JSON.$N$1];[.$T194];[$JSON.$O$1];IF(ISNA([.$V194]);&quot;null&quot;;[.$V194]);[$JSON.$P$1];[.$X194];[$JSON.$Q$1];[.$A194];[$JSON.$R$1];[.$B194];[$JSON.$S$1])" office:value-type="string" office:string-value="{&quot;id&quot;:&quot;2-61&quot;,&quot;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orderTable&quot;:193,&quot;orderDeck&quot;:296}," calcext:value-type="string">
            <text:p>{"id":"2-61","name":"リドロー","kana":"りどろー","traitText":null,"ruleText":"2ドローして、自分の手札1枚を墓地に置く。","legacyText":"冥府発動","imageUrl":"https://one-draw.jp/ijinden/cardlist/002/card/02_061.png","expansion":25,"rarity":1,"type":3,"level":2,"color":2,"term":0,"trait":0,"power":null,"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G195];[$収録番号.$A$1:$収録番号.$B$9];2;0)" office:value-type="float" office:value="25" calcext:value-type="float">
            <text:p>25</text:p>
          </table:table-cell>
          <table:table-cell office:value-type="string" calcext:value-type="string">
            <text:p>N</text:p>
          </table:table-cell>
          <table:table-cell table:formula="of:=VLOOKUP([.I195];[$レアリティ番号.$A$1:$レアリティ番号.$B$4];2;0)" office:value-type="float" office:value="1" calcext:value-type="float">
            <text:p>1</text:p>
          </table:table-cell>
          <table:table-cell office:value-type="string" calcext:value-type="string">
            <text:p>マホウ</text:p>
          </table:table-cell>
          <table:table-cell table:formula="of:=VLOOKUP([.K195];[$種類番号.$A$1:$種類番号.$B$4];2;0)" office:value-type="float" office:value="3" calcext:value-type="float">
            <text:p>3</text:p>
          </table:table-cell>
          <table:table-cell office:value-type="string" calcext:value-type="string">
            <text:p>青</text:p>
          </table:table-cell>
          <table:table-cell table:formula="of:=VLOOKUP([.M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IF(ISNA([.$S195]);&quot;null&quot;;&quot;&quot;&quot;&quot;&amp;[.$S195]&amp;&quot;&quot;&quot;&quot;);[$JSON.$E$1];[.$U195];[$JSON.$F$1];IF(ISNA([.$W195]);&quot;null&quot;;&quot;&quot;&quot;&quot;&amp;[.$W195]&amp;&quot;&quot;&quot;&quot;);[$JSON.$G$1];[.$Y195];[$JSON.$H$1];[.$H195];[$JSON.$I$1];[.J195];[$JSON.$J$1];[.$L195];[$JSON.$K$1];[.$O195];[$JSON.$L$1];[.$N195];[$JSON.$M$1];[.$R195];[$JSON.$N$1];[.$T195];[$JSON.$O$1];IF(ISNA([.$V195]);&quot;null&quot;;[.$V195]);[$JSON.$P$1];[.$X195];[$JSON.$Q$1];[.$A195];[$JSON.$R$1];[.$B195];[$JSON.$S$1])" office:value-type="string" office:string-value="{&quot;id&quot;:&quot;2-62&quot;,&quot;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orderTable&quot;:194,&quot;orderDeck&quot;:320}," calcext:value-type="string">
            <text:p>{"id":"2-62","name":"テンペスト","kana":"てんぺすと","traitText":null,"ruleText":"相手の戦場の寝ているイジンすべてを手札に戻す。","legacyText":"冥府発動","imageUrl":"https://one-draw.jp/ijinden/cardlist/002/card/02_062.png","expansion":25,"rarity":1,"type":3,"level":4,"color":2,"term":0,"trait":0,"power":null,"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G196];[$収録番号.$A$1:$収録番号.$B$9];2;0)" office:value-type="float" office:value="25" calcext:value-type="float">
            <text:p>25</text:p>
          </table:table-cell>
          <table:table-cell office:value-type="string" calcext:value-type="string">
            <text:p>N</text:p>
          </table:table-cell>
          <table:table-cell table:formula="of:=VLOOKUP([.I196];[$レアリティ番号.$A$1:$レアリティ番号.$B$4];2;0)" office:value-type="float" office:value="1" calcext:value-type="float">
            <text:p>1</text:p>
          </table:table-cell>
          <table:table-cell office:value-type="string" calcext:value-type="string">
            <text:p>マホウ</text:p>
          </table:table-cell>
          <table:table-cell table:formula="of:=VLOOKUP([.K196];[$種類番号.$A$1:$種類番号.$B$4];2;0)" office:value-type="float" office:value="3" calcext:value-type="float">
            <text:p>3</text:p>
          </table:table-cell>
          <table:table-cell office:value-type="string" calcext:value-type="string">
            <text:p>緑</text:p>
          </table:table-cell>
          <table:table-cell table:formula="of:=VLOOKUP([.M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IF(ISNA([.$S196]);&quot;null&quot;;&quot;&quot;&quot;&quot;&amp;[.$S196]&amp;&quot;&quot;&quot;&quot;);[$JSON.$E$1];[.$U196];[$JSON.$F$1];IF(ISNA([.$W196]);&quot;null&quot;;&quot;&quot;&quot;&quot;&amp;[.$W196]&amp;&quot;&quot;&quot;&quot;);[$JSON.$G$1];[.$Y196];[$JSON.$H$1];[.$H196];[$JSON.$I$1];[.J196];[$JSON.$J$1];[.$L196];[$JSON.$K$1];[.$O196];[$JSON.$L$1];[.$N196];[$JSON.$M$1];[.$R196];[$JSON.$N$1];[.$T196];[$JSON.$O$1];IF(ISNA([.$V196]);&quot;null&quot;;[.$V196]);[$JSON.$P$1];[.$X196];[$JSON.$Q$1];[.$A196];[$JSON.$R$1];[.$B196];[$JSON.$S$1])" office:value-type="string" office:string-value="{&quot;id&quot;:&quot;2-63&quot;,&quot;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orderTable&quot;:195,&quot;orderDeck&quot;:322}," calcext:value-type="string">
            <text:p>{"id":"2-63","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G197];[$収録番号.$A$1:$収録番号.$B$9];2;0)" office:value-type="float" office:value="25" calcext:value-type="float">
            <text:p>25</text:p>
          </table:table-cell>
          <table:table-cell office:value-type="string" calcext:value-type="string">
            <text:p>N</text:p>
          </table:table-cell>
          <table:table-cell table:formula="of:=VLOOKUP([.I197];[$レアリティ番号.$A$1:$レアリティ番号.$B$4];2;0)" office:value-type="float" office:value="1" calcext:value-type="float">
            <text:p>1</text:p>
          </table:table-cell>
          <table:table-cell office:value-type="string" calcext:value-type="string">
            <text:p>マホウ</text:p>
          </table:table-cell>
          <table:table-cell table:formula="of:=VLOOKUP([.K197];[$種類番号.$A$1:$種類番号.$B$4];2;0)" office:value-type="float" office:value="3" calcext:value-type="float">
            <text:p>3</text:p>
          </table:table-cell>
          <table:table-cell office:value-type="string" calcext:value-type="string">
            <text:p>緑</text:p>
          </table:table-cell>
          <table:table-cell table:formula="of:=VLOOKUP([.M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IF(ISNA([.$S197]);&quot;null&quot;;&quot;&quot;&quot;&quot;&amp;[.$S197]&amp;&quot;&quot;&quot;&quot;);[$JSON.$E$1];[.$U197];[$JSON.$F$1];IF(ISNA([.$W197]);&quot;null&quot;;&quot;&quot;&quot;&quot;&amp;[.$W197]&amp;&quot;&quot;&quot;&quot;);[$JSON.$G$1];[.$Y197];[$JSON.$H$1];[.$H197];[$JSON.$I$1];[.J197];[$JSON.$J$1];[.$L197];[$JSON.$K$1];[.$O197];[$JSON.$L$1];[.$N197];[$JSON.$M$1];[.$R197];[$JSON.$N$1];[.$T197];[$JSON.$O$1];IF(ISNA([.$V197]);&quot;null&quot;;[.$V197]);[$JSON.$P$1];[.$X197];[$JSON.$Q$1];[.$A197];[$JSON.$R$1];[.$B197];[$JSON.$S$1])" office:value-type="string" office:string-value="{&quot;id&quot;:&quot;2-64&quot;,&quot;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orderTable&quot;:196,&quot;orderDeck&quot;:329}," calcext:value-type="string">
            <text:p>{"id":"2-64","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G198];[$収録番号.$A$1:$収録番号.$B$9];2;0)" office:value-type="float" office:value="25" calcext:value-type="float">
            <text:p>25</text:p>
          </table:table-cell>
          <table:table-cell office:value-type="string" calcext:value-type="string">
            <text:p>N</text:p>
          </table:table-cell>
          <table:table-cell table:formula="of:=VLOOKUP([.I198];[$レアリティ番号.$A$1:$レアリティ番号.$B$4];2;0)" office:value-type="float" office:value="1" calcext:value-type="float">
            <text:p>1</text:p>
          </table:table-cell>
          <table:table-cell office:value-type="string" calcext:value-type="string">
            <text:p>マホウ</text:p>
          </table:table-cell>
          <table:table-cell table:formula="of:=VLOOKUP([.K198];[$種類番号.$A$1:$種類番号.$B$4];2;0)" office:value-type="float" office:value="3" calcext:value-type="float">
            <text:p>3</text:p>
          </table:table-cell>
          <table:table-cell office:value-type="string" calcext:value-type="string">
            <text:p>緑</text:p>
          </table:table-cell>
          <table:table-cell table:formula="of:=VLOOKUP([.M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8];[$特性番号.$A$1:$特性番号.$B$8];2;0);0)" office:value-type="float" office:value="0" calcext:value-type="float">
            <text:p>0</text:p>
          </table:table-cell>
          <table:table-cell office:value-type="string" calcext:value-type="string">
            <text:p>マリョク配置権+1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IF(ISNA([.$S198]);&quot;null&quot;;&quot;&quot;&quot;&quot;&amp;[.$S198]&amp;&quot;&quot;&quot;&quot;);[$JSON.$E$1];[.$U198];[$JSON.$F$1];IF(ISNA([.$W198]);&quot;null&quot;;&quot;&quot;&quot;&quot;&amp;[.$W198]&amp;&quot;&quot;&quot;&quot;);[$JSON.$G$1];[.$Y198];[$JSON.$H$1];[.$H198];[$JSON.$I$1];[.J198];[$JSON.$J$1];[.$L198];[$JSON.$K$1];[.$O198];[$JSON.$L$1];[.$N198];[$JSON.$M$1];[.$R198];[$JSON.$N$1];[.$T198];[$JSON.$O$1];IF(ISNA([.$V198]);&quot;null&quot;;[.$V198]);[$JSON.$P$1];[.$X198];[$JSON.$Q$1];[.$A198];[$JSON.$R$1];[.$B198];[$JSON.$S$1])" office:value-type="string" office:string-value="{&quot;id&quot;:&quot;2-65&quot;,&quot;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orderTable&quot;:197,&quot;orderDeck&quot;:284}," calcext:value-type="string">
            <text:p>{"id":"2-65","name":"チャージ","kana":"ちゃーじ","traitText":null,"ruleText":"マリョク配置権+1する。","legacyText":"手札に戻す","imageUrl":"https://one-draw.jp/ijinden/cardlist/002/card/02_065.png","expansion":25,"rarity":1,"type":3,"level":1,"color":4,"term":0,"trait":0,"power":null,"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G199];[$収録番号.$A$1:$収録番号.$B$9];2;0)" office:value-type="float" office:value="25" calcext:value-type="float">
            <text:p>25</text:p>
          </table:table-cell>
          <table:table-cell office:value-type="string" calcext:value-type="string">
            <text:p>N</text:p>
          </table:table-cell>
          <table:table-cell table:formula="of:=VLOOKUP([.I199];[$レアリティ番号.$A$1:$レアリティ番号.$B$4];2;0)" office:value-type="float" office:value="1" calcext:value-type="float">
            <text:p>1</text:p>
          </table:table-cell>
          <table:table-cell office:value-type="string" calcext:value-type="string">
            <text:p>マホウ</text:p>
          </table:table-cell>
          <table:table-cell table:formula="of:=VLOOKUP([.K199];[$種類番号.$A$1:$種類番号.$B$4];2;0)" office:value-type="float" office:value="3" calcext:value-type="float">
            <text:p>3</text:p>
          </table:table-cell>
          <table:table-cell office:value-type="string" calcext:value-type="string">
            <text:p>黄</text:p>
          </table:table-cell>
          <table:table-cell table:formula="of:=VLOOKUP([.M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IF(ISNA([.$S199]);&quot;null&quot;;&quot;&quot;&quot;&quot;&amp;[.$S199]&amp;&quot;&quot;&quot;&quot;);[$JSON.$E$1];[.$U199];[$JSON.$F$1];IF(ISNA([.$W199]);&quot;null&quot;;&quot;&quot;&quot;&quot;&amp;[.$W199]&amp;&quot;&quot;&quot;&quot;);[$JSON.$G$1];[.$Y199];[$JSON.$H$1];[.$H199];[$JSON.$I$1];[.J199];[$JSON.$J$1];[.$L199];[$JSON.$K$1];[.$O199];[$JSON.$L$1];[.$N199];[$JSON.$M$1];[.$R199];[$JSON.$N$1];[.$T199];[$JSON.$O$1];IF(ISNA([.$V199]);&quot;null&quot;;[.$V199]);[$JSON.$P$1];[.$X199];[$JSON.$Q$1];[.$A199];[$JSON.$R$1];[.$B199];[$JSON.$S$1])" office:value-type="string" office:string-value="{&quot;id&quot;:&quot;2-66&quot;,&quot;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orderTable&quot;:198,&quot;orderDeck&quot;:330}," calcext:value-type="string">
            <text:p>{"id":"2-66","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G200];[$収録番号.$A$1:$収録番号.$B$9];2;0)" office:value-type="float" office:value="25" calcext:value-type="float">
            <text:p>25</text:p>
          </table:table-cell>
          <table:table-cell office:value-type="string" calcext:value-type="string">
            <text:p>R</text:p>
          </table:table-cell>
          <table:table-cell table:formula="of:=VLOOKUP([.I200];[$レアリティ番号.$A$1:$レアリティ番号.$B$4];2;0)" office:value-type="float" office:value="2" calcext:value-type="float">
            <text:p>2</text:p>
          </table:table-cell>
          <table:table-cell office:value-type="string" calcext:value-type="string">
            <text:p>マホウ</text:p>
          </table:table-cell>
          <table:table-cell table:formula="of:=VLOOKUP([.K200];[$種類番号.$A$1:$種類番号.$B$4];2;0)" office:value-type="float" office:value="3" calcext:value-type="float">
            <text:p>3</text:p>
          </table:table-cell>
          <table:table-cell office:value-type="string" calcext:value-type="string">
            <text:p>黄</text:p>
          </table:table-cell>
          <table:table-cell table:formula="of:=VLOOKUP([.M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IF(ISNA([.$S200]);&quot;null&quot;;&quot;&quot;&quot;&quot;&amp;[.$S200]&amp;&quot;&quot;&quot;&quot;);[$JSON.$E$1];[.$U200];[$JSON.$F$1];IF(ISNA([.$W200]);&quot;null&quot;;&quot;&quot;&quot;&quot;&amp;[.$W200]&amp;&quot;&quot;&quot;&quot;);[$JSON.$G$1];[.$Y200];[$JSON.$H$1];[.$H200];[$JSON.$I$1];[.J200];[$JSON.$J$1];[.$L200];[$JSON.$K$1];[.$O200];[$JSON.$L$1];[.$N200];[$JSON.$M$1];[.$R200];[$JSON.$N$1];[.$T200];[$JSON.$O$1];IF(ISNA([.$V200]);&quot;null&quot;;[.$V200]);[$JSON.$P$1];[.$X200];[$JSON.$Q$1];[.$A200];[$JSON.$R$1];[.$B200];[$JSON.$S$1])" office:value-type="string" office:string-value="{&quot;id&quot;:&quot;2-67&quot;,&quot;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orderTable&quot;:199,&quot;orderDeck&quot;:313}," calcext:value-type="string">
            <text:p>{"id":"2-67","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G201];[$収録番号.$A$1:$収録番号.$B$9];2;0)" office:value-type="float" office:value="25" calcext:value-type="float">
            <text:p>25</text:p>
          </table:table-cell>
          <table:table-cell office:value-type="string" calcext:value-type="string">
            <text:p>N</text:p>
          </table:table-cell>
          <table:table-cell table:formula="of:=VLOOKUP([.I201];[$レアリティ番号.$A$1:$レアリティ番号.$B$4];2;0)" office:value-type="float" office:value="1" calcext:value-type="float">
            <text:p>1</text:p>
          </table:table-cell>
          <table:table-cell office:value-type="string" calcext:value-type="string">
            <text:p>マホウ</text:p>
          </table:table-cell>
          <table:table-cell table:formula="of:=VLOOKUP([.K201];[$種類番号.$A$1:$種類番号.$B$4];2;0)" office:value-type="float" office:value="3" calcext:value-type="float">
            <text:p>3</text:p>
          </table:table-cell>
          <table:table-cell office:value-type="string" calcext:value-type="string">
            <text:p>黄</text:p>
          </table:table-cell>
          <table:table-cell table:formula="of:=VLOOKUP([.M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IF(ISNA([.$S201]);&quot;null&quot;;&quot;&quot;&quot;&quot;&amp;[.$S201]&amp;&quot;&quot;&quot;&quot;);[$JSON.$E$1];[.$U201];[$JSON.$F$1];IF(ISNA([.$W201]);&quot;null&quot;;&quot;&quot;&quot;&quot;&amp;[.$W201]&amp;&quot;&quot;&quot;&quot;);[$JSON.$G$1];[.$Y201];[$JSON.$H$1];[.$H201];[$JSON.$I$1];[.J201];[$JSON.$J$1];[.$L201];[$JSON.$K$1];[.$O201];[$JSON.$L$1];[.$N201];[$JSON.$M$1];[.$R201];[$JSON.$N$1];[.$T201];[$JSON.$O$1];IF(ISNA([.$V201]);&quot;null&quot;;[.$V201]);[$JSON.$P$1];[.$X201];[$JSON.$Q$1];[.$A201];[$JSON.$R$1];[.$B201];[$JSON.$S$1])" office:value-type="string" office:string-value="{&quot;id&quot;:&quot;2-68&quot;,&quot;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orderTable&quot;:200,&quot;orderDeck&quot;:323}," calcext:value-type="string">
            <text:p>{"id":"2-68","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G202];[$収録番号.$A$1:$収録番号.$B$9];2;0)" office:value-type="float" office:value="25" calcext:value-type="float">
            <text:p>25</text:p>
          </table:table-cell>
          <table:table-cell office:value-type="string" calcext:value-type="string">
            <text:p>N</text:p>
          </table:table-cell>
          <table:table-cell table:formula="of:=VLOOKUP([.I202];[$レアリティ番号.$A$1:$レアリティ番号.$B$4];2;0)" office:value-type="float" office:value="1" calcext:value-type="float">
            <text:p>1</text:p>
          </table:table-cell>
          <table:table-cell office:value-type="string" calcext:value-type="string">
            <text:p>マホウ</text:p>
          </table:table-cell>
          <table:table-cell table:formula="of:=VLOOKUP([.K202];[$種類番号.$A$1:$種類番号.$B$4];2;0)" office:value-type="float" office:value="3" calcext:value-type="float">
            <text:p>3</text:p>
          </table:table-cell>
          <table:table-cell office:value-type="string" calcext:value-type="string">
            <text:p>黄</text:p>
          </table:table-cell>
          <table:table-cell table:formula="of:=VLOOKUP([.M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Q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IF(ISNA([.$S202]);&quot;null&quot;;&quot;&quot;&quot;&quot;&amp;[.$S202]&amp;&quot;&quot;&quot;&quot;);[$JSON.$E$1];[.$U202];[$JSON.$F$1];IF(ISNA([.$W202]);&quot;null&quot;;&quot;&quot;&quot;&quot;&amp;[.$W202]&amp;&quot;&quot;&quot;&quot;);[$JSON.$G$1];[.$Y202];[$JSON.$H$1];[.$H202];[$JSON.$I$1];[.J202];[$JSON.$J$1];[.$L202];[$JSON.$K$1];[.$O202];[$JSON.$L$1];[.$N202];[$JSON.$M$1];[.$R202];[$JSON.$N$1];[.$T202];[$JSON.$O$1];IF(ISNA([.$V202]);&quot;null&quot;;[.$V202]);[$JSON.$P$1];[.$X202];[$JSON.$Q$1];[.$A202];[$JSON.$R$1];[.$B202];[$JSON.$S$1])" office:value-type="string" office:string-value="{&quot;id&quot;:&quot;2-69&quot;,&quot;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orderTable&quot;:201,&quot;orderDeck&quot;:314}," calcext:value-type="string">
            <text:p>{"id":"2-69","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G203];[$収録番号.$A$1:$収録番号.$B$9];2;0)" office:value-type="float" office:value="25" calcext:value-type="float">
            <text:p>25</text:p>
          </table:table-cell>
          <table:table-cell office:value-type="string" calcext:value-type="string">
            <text:p>N</text:p>
          </table:table-cell>
          <table:table-cell table:formula="of:=VLOOKUP([.I203];[$レアリティ番号.$A$1:$レアリティ番号.$B$4];2;0)" office:value-type="float" office:value="1" calcext:value-type="float">
            <text:p>1</text:p>
          </table:table-cell>
          <table:table-cell office:value-type="string" calcext:value-type="string">
            <text:p>マホウ</text:p>
          </table:table-cell>
          <table:table-cell table:formula="of:=VLOOKUP([.K203];[$種類番号.$A$1:$種類番号.$B$4];2;0)" office:value-type="float" office:value="3" calcext:value-type="float">
            <text:p>3</text:p>
          </table:table-cell>
          <table:table-cell office:value-type="string" calcext:value-type="string">
            <text:p>黄</text:p>
          </table:table-cell>
          <table:table-cell table:formula="of:=VLOOKUP([.M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Q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IF(ISNA([.$S203]);&quot;null&quot;;&quot;&quot;&quot;&quot;&amp;[.$S203]&amp;&quot;&quot;&quot;&quot;);[$JSON.$E$1];[.$U203];[$JSON.$F$1];IF(ISNA([.$W203]);&quot;null&quot;;&quot;&quot;&quot;&quot;&amp;[.$W203]&amp;&quot;&quot;&quot;&quot;);[$JSON.$G$1];[.$Y203];[$JSON.$H$1];[.$H203];[$JSON.$I$1];[.J203];[$JSON.$J$1];[.$L203];[$JSON.$K$1];[.$O203];[$JSON.$L$1];[.$N203];[$JSON.$M$1];[.$R203];[$JSON.$N$1];[.$T203];[$JSON.$O$1];IF(ISNA([.$V203]);&quot;null&quot;;[.$V203]);[$JSON.$P$1];[.$X203];[$JSON.$Q$1];[.$A203];[$JSON.$R$1];[.$B203];[$JSON.$S$1])" office:value-type="string" office:string-value="{&quot;id&quot;:&quot;2-70&quot;,&quot;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orderTable&quot;:202,&quot;orderDeck&quot;:315}," calcext:value-type="string">
            <text:p>{"id":"2-70","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G204];[$収録番号.$A$1:$収録番号.$B$9];2;0)" office:value-type="float" office:value="25" calcext:value-type="float">
            <text:p>25</text:p>
          </table:table-cell>
          <table:table-cell office:value-type="string" calcext:value-type="string">
            <text:p>N</text:p>
          </table:table-cell>
          <table:table-cell table:formula="of:=VLOOKUP([.I204];[$レアリティ番号.$A$1:$レアリティ番号.$B$4];2;0)" office:value-type="float" office:value="1" calcext:value-type="float">
            <text:p>1</text:p>
          </table:table-cell>
          <table:table-cell office:value-type="string" calcext:value-type="string">
            <text:p>マホウ</text:p>
          </table:table-cell>
          <table:table-cell table:formula="of:=VLOOKUP([.K204];[$種類番号.$A$1:$種類番号.$B$4];2;0)" office:value-type="float" office:value="3" calcext:value-type="float">
            <text:p>3</text:p>
          </table:table-cell>
          <table:table-cell office:value-type="string" calcext:value-type="string">
            <text:p>黄</text:p>
          </table:table-cell>
          <table:table-cell table:formula="of:=VLOOKUP([.M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Q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IF(ISNA([.$S204]);&quot;null&quot;;&quot;&quot;&quot;&quot;&amp;[.$S204]&amp;&quot;&quot;&quot;&quot;);[$JSON.$E$1];[.$U204];[$JSON.$F$1];IF(ISNA([.$W204]);&quot;null&quot;;&quot;&quot;&quot;&quot;&amp;[.$W204]&amp;&quot;&quot;&quot;&quot;);[$JSON.$G$1];[.$Y204];[$JSON.$H$1];[.$H204];[$JSON.$I$1];[.J204];[$JSON.$J$1];[.$L204];[$JSON.$K$1];[.$O204];[$JSON.$L$1];[.$N204];[$JSON.$M$1];[.$R204];[$JSON.$N$1];[.$T204];[$JSON.$O$1];IF(ISNA([.$V204]);&quot;null&quot;;[.$V204]);[$JSON.$P$1];[.$X204];[$JSON.$Q$1];[.$A204];[$JSON.$R$1];[.$B204];[$JSON.$S$1])" office:value-type="string" office:string-value="{&quot;id&quot;:&quot;2-71&quot;,&quot;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orderTable&quot;:203,&quot;orderDeck&quot;:316}," calcext:value-type="string">
            <text:p>{"id":"2-71","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G205];[$収録番号.$A$1:$収録番号.$B$9];2;0)" office:value-type="float" office:value="25" calcext:value-type="float">
            <text:p>25</text:p>
          </table:table-cell>
          <table:table-cell office:value-type="string" calcext:value-type="string">
            <text:p>N</text:p>
          </table:table-cell>
          <table:table-cell table:formula="of:=VLOOKUP([.I205];[$レアリティ番号.$A$1:$レアリティ番号.$B$4];2;0)" office:value-type="float" office:value="1" calcext:value-type="float">
            <text:p>1</text:p>
          </table:table-cell>
          <table:table-cell office:value-type="string" calcext:value-type="string">
            <text:p>マリョク</text:p>
          </table:table-cell>
          <table:table-cell table:formula="of:=VLOOKUP([.K205];[$種類番号.$A$1:$種類番号.$B$4];2;0)" office:value-type="float" office:value="4" calcext:value-type="float">
            <text:p>4</text:p>
          </table:table-cell>
          <table:table-cell office:value-type="string" calcext:value-type="string">
            <text:p>黄</text:p>
          </table:table-cell>
          <table:table-cell table:formula="of:=VLOOKUP([.M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5];[$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IF(ISNA([.$S205]);&quot;null&quot;;&quot;&quot;&quot;&quot;&amp;[.$S205]&amp;&quot;&quot;&quot;&quot;);[$JSON.$E$1];[.$U205];[$JSON.$F$1];IF(ISNA([.$W205]);&quot;null&quot;;&quot;&quot;&quot;&quot;&amp;[.$W205]&amp;&quot;&quot;&quot;&quot;);[$JSON.$G$1];[.$Y205];[$JSON.$H$1];[.$H205];[$JSON.$I$1];[.J205];[$JSON.$J$1];[.$L205];[$JSON.$K$1];[.$O205];[$JSON.$L$1];[.$N205];[$JSON.$M$1];[.$R205];[$JSON.$N$1];[.$T205];[$JSON.$O$1];IF(ISNA([.$V205]);&quot;null&quot;;[.$V205]);[$JSON.$P$1];[.$X205];[$JSON.$Q$1];[.$A205];[$JSON.$R$1];[.$B205];[$JSON.$S$1])" office:value-type="string" office:string-value="{&quot;id&quot;:&quot;2-72&quot;,&quot;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orderTable&quot;:204,&quot;orderDeck&quot;:362}," calcext:value-type="string">
            <text:p>{"id":"2-72","name":"サンドグラス","kana":"さんどぐらす","traitText":null,"ruleText":"魔力ゾーンに置かれたとき、1ドローする。","legacyText":null,"imageUrl":"https://one-draw.jp/ijinden/cardlist/002/card/02_072.png","expansion":25,"rarity":1,"type":4,"level":1,"color":8,"term":0,"trait":0,"power":null,"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G206];[$収録番号.$A$1:$収録番号.$B$9];2;0)" office:value-type="float" office:value="25" calcext:value-type="float">
            <text:p>25</text:p>
          </table:table-cell>
          <table:table-cell office:value-type="string" calcext:value-type="string">
            <text:p>N</text:p>
          </table:table-cell>
          <table:table-cell table:formula="of:=VLOOKUP([.I206];[$レアリティ番号.$A$1:$レアリティ番号.$B$4];2;0)" office:value-type="float" office:value="1" calcext:value-type="float">
            <text:p>1</text:p>
          </table:table-cell>
          <table:table-cell office:value-type="string" calcext:value-type="string">
            <text:p>マリョク</text:p>
          </table:table-cell>
          <table:table-cell table:formula="of:=VLOOKUP([.K206];[$種類番号.$A$1:$種類番号.$B$4];2;0)" office:value-type="float" office:value="4" calcext:value-type="float">
            <text:p>4</text:p>
          </table:table-cell>
          <table:table-cell office:value-type="string" calcext:value-type="string">
            <text:p>黄</text:p>
          </table:table-cell>
          <table:table-cell table:formula="of:=VLOOKUP([.M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IF(ISNA([.$S206]);&quot;null&quot;;&quot;&quot;&quot;&quot;&amp;[.$S206]&amp;&quot;&quot;&quot;&quot;);[$JSON.$E$1];[.$U206];[$JSON.$F$1];IF(ISNA([.$W206]);&quot;null&quot;;&quot;&quot;&quot;&quot;&amp;[.$W206]&amp;&quot;&quot;&quot;&quot;);[$JSON.$G$1];[.$Y206];[$JSON.$H$1];[.$H206];[$JSON.$I$1];[.J206];[$JSON.$J$1];[.$L206];[$JSON.$K$1];[.$O206];[$JSON.$L$1];[.$N206];[$JSON.$M$1];[.$R206];[$JSON.$N$1];[.$T206];[$JSON.$O$1];IF(ISNA([.$V206]);&quot;null&quot;;[.$V206]);[$JSON.$P$1];[.$X206];[$JSON.$Q$1];[.$A206];[$JSON.$R$1];[.$B206];[$JSON.$S$1])" office:value-type="string" office:string-value="{&quot;id&quot;:&quot;2-73&quot;,&quot;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orderTable&quot;:205,&quot;orderDeck&quot;:363}," calcext:value-type="string">
            <text:p>{"id":"2-73","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G207];[$収録番号.$A$1:$収録番号.$B$9];2;0)" office:value-type="float" office:value="25" calcext:value-type="float">
            <text:p>25</text:p>
          </table:table-cell>
          <table:table-cell office:value-type="string" calcext:value-type="string">
            <text:p>R</text:p>
          </table:table-cell>
          <table:table-cell table:formula="of:=VLOOKUP([.I207];[$レアリティ番号.$A$1:$レアリティ番号.$B$4];2;0)" office:value-type="float" office:value="2" calcext:value-type="float">
            <text:p>2</text:p>
          </table:table-cell>
          <table:table-cell office:value-type="string" calcext:value-type="string">
            <text:p>マリョク</text:p>
          </table:table-cell>
          <table:table-cell table:formula="of:=VLOOKUP([.K207];[$種類番号.$A$1:$種類番号.$B$4];2;0)" office:value-type="float" office:value="4" calcext:value-type="float">
            <text:p>4</text:p>
          </table:table-cell>
          <table:table-cell office:value-type="string" calcext:value-type="string">
            <text:p>黄</text:p>
          </table:table-cell>
          <table:table-cell table:formula="of:=VLOOKUP([.M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7];[$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IF(ISNA([.$S207]);&quot;null&quot;;&quot;&quot;&quot;&quot;&amp;[.$S207]&amp;&quot;&quot;&quot;&quot;);[$JSON.$E$1];[.$U207];[$JSON.$F$1];IF(ISNA([.$W207]);&quot;null&quot;;&quot;&quot;&quot;&quot;&amp;[.$W207]&amp;&quot;&quot;&quot;&quot;);[$JSON.$G$1];[.$Y207];[$JSON.$H$1];[.$H207];[$JSON.$I$1];[.J207];[$JSON.$J$1];[.$L207];[$JSON.$K$1];[.$O207];[$JSON.$L$1];[.$N207];[$JSON.$M$1];[.$R207];[$JSON.$N$1];[.$T207];[$JSON.$O$1];IF(ISNA([.$V207]);&quot;null&quot;;[.$V207]);[$JSON.$P$1];[.$X207];[$JSON.$Q$1];[.$A207];[$JSON.$R$1];[.$B207];[$JSON.$S$1])" office:value-type="string" office:string-value="{&quot;id&quot;:&quot;2-74&quot;,&quot;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orderTable&quot;:206,&quot;orderDeck&quot;:382}," calcext:value-type="string">
            <text:p>{"id":"2-74","name":"イエローオーブ","kana":"いえろーおーぶ","traitText":null,"ruleText":"","legacyText":"復元","imageUrl":"https://one-draw.jp/ijinden/cardlist/002/card/02_074.png","expansion":25,"rarity":2,"type":4,"level":2,"color":8,"term":0,"trait":0,"power":null,"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G208];[$収録番号.$A$1:$収録番号.$B$9];2;0)" office:value-type="float" office:value="25" calcext:value-type="float">
            <text:p>25</text:p>
          </table:table-cell>
          <table:table-cell office:value-type="string" calcext:value-type="string">
            <text:p>N</text:p>
          </table:table-cell>
          <table:table-cell table:formula="of:=VLOOKUP([.I208];[$レアリティ番号.$A$1:$レアリティ番号.$B$4];2;0)" office:value-type="float" office:value="1" calcext:value-type="float">
            <text:p>1</text:p>
          </table:table-cell>
          <table:table-cell office:value-type="string" calcext:value-type="string">
            <text:p>マリョク</text:p>
          </table:table-cell>
          <table:table-cell table:formula="of:=VLOOKUP([.K208];[$種類番号.$A$1:$種類番号.$B$4];2;0)" office:value-type="float" office:value="4" calcext:value-type="float">
            <text:p>4</text:p>
          </table:table-cell>
          <table:table-cell office:value-type="string" calcext:value-type="string">
            <text:p>赤黄</text:p>
          </table:table-cell>
          <table:table-cell table:formula="of:=VLOOKUP([.M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8];[$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IF(ISNA([.$S208]);&quot;null&quot;;&quot;&quot;&quot;&quot;&amp;[.$S208]&amp;&quot;&quot;&quot;&quot;);[$JSON.$E$1];[.$U208];[$JSON.$F$1];IF(ISNA([.$W208]);&quot;null&quot;;&quot;&quot;&quot;&quot;&amp;[.$W208]&amp;&quot;&quot;&quot;&quot;);[$JSON.$G$1];[.$Y208];[$JSON.$H$1];[.$H208];[$JSON.$I$1];[.J208];[$JSON.$J$1];[.$L208];[$JSON.$K$1];[.$O208];[$JSON.$L$1];[.$N208];[$JSON.$M$1];[.$R208];[$JSON.$N$1];[.$T208];[$JSON.$O$1];IF(ISNA([.$V208]);&quot;null&quot;;[.$V208]);[$JSON.$P$1];[.$X208];[$JSON.$Q$1];[.$A208];[$JSON.$R$1];[.$B208];[$JSON.$S$1])" office:value-type="string" office:string-value="{&quot;id&quot;:&quot;2-75&quot;,&quot;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orderTable&quot;:207,&quot;orderDeck&quot;:372}," calcext:value-type="string">
            <text:p>{"id":"2-75","name":"RYマーブルストーン","kana":"ryまーぶるすとーん","traitText":null,"ruleText":"","legacyText":"復元","imageUrl":"https://one-draw.jp/ijinden/cardlist/002/card/02_075.png","expansion":25,"rarity":1,"type":4,"level":1,"color":41,"term":0,"trait":0,"power":null,"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G209];[$収録番号.$A$1:$収録番号.$B$9];2;0)" office:value-type="float" office:value="25" calcext:value-type="float">
            <text:p>25</text:p>
          </table:table-cell>
          <table:table-cell office:value-type="string" calcext:value-type="string">
            <text:p>N</text:p>
          </table:table-cell>
          <table:table-cell table:formula="of:=VLOOKUP([.I209];[$レアリティ番号.$A$1:$レアリティ番号.$B$4];2;0)" office:value-type="float" office:value="1" calcext:value-type="float">
            <text:p>1</text:p>
          </table:table-cell>
          <table:table-cell office:value-type="string" calcext:value-type="string">
            <text:p>マリョク</text:p>
          </table:table-cell>
          <table:table-cell table:formula="of:=VLOOKUP([.K209];[$種類番号.$A$1:$種類番号.$B$4];2;0)" office:value-type="float" office:value="4" calcext:value-type="float">
            <text:p>4</text:p>
          </table:table-cell>
          <table:table-cell office:value-type="string" calcext:value-type="string">
            <text:p>青黄</text:p>
          </table:table-cell>
          <table:table-cell table:formula="of:=VLOOKUP([.M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IF(ISNA([.$S209]);&quot;null&quot;;&quot;&quot;&quot;&quot;&amp;[.$S209]&amp;&quot;&quot;&quot;&quot;);[$JSON.$E$1];[.$U209];[$JSON.$F$1];IF(ISNA([.$W209]);&quot;null&quot;;&quot;&quot;&quot;&quot;&amp;[.$W209]&amp;&quot;&quot;&quot;&quot;);[$JSON.$G$1];[.$Y209];[$JSON.$H$1];[.$H209];[$JSON.$I$1];[.J209];[$JSON.$J$1];[.$L209];[$JSON.$K$1];[.$O209];[$JSON.$L$1];[.$N209];[$JSON.$M$1];[.$R209];[$JSON.$N$1];[.$T209];[$JSON.$O$1];IF(ISNA([.$V209]);&quot;null&quot;;[.$V209]);[$JSON.$P$1];[.$X209];[$JSON.$Q$1];[.$A209];[$JSON.$R$1];[.$B209];[$JSON.$S$1])" office:value-type="string" office:string-value="{&quot;id&quot;:&quot;2-76&quot;,&quot;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orderTable&quot;:208,&quot;orderDeck&quot;:373}," calcext:value-type="string">
            <text:p>{"id":"2-76","name":"BYマーブルストーン","kana":"byまーぶるすとーん","traitText":null,"ruleText":"","legacyText":"復元","imageUrl":"https://one-draw.jp/ijinden/cardlist/002/card/02_076.png","expansion":25,"rarity":1,"type":4,"level":1,"color":42,"term":0,"trait":0,"power":null,"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G210];[$収録番号.$A$1:$収録番号.$B$9];2;0)" office:value-type="float" office:value="25" calcext:value-type="float">
            <text:p>25</text:p>
          </table:table-cell>
          <table:table-cell office:value-type="string" calcext:value-type="string">
            <text:p>N</text:p>
          </table:table-cell>
          <table:table-cell table:formula="of:=VLOOKUP([.I210];[$レアリティ番号.$A$1:$レアリティ番号.$B$4];2;0)" office:value-type="float" office:value="1" calcext:value-type="float">
            <text:p>1</text:p>
          </table:table-cell>
          <table:table-cell office:value-type="string" calcext:value-type="string">
            <text:p>マリョク</text:p>
          </table:table-cell>
          <table:table-cell table:formula="of:=VLOOKUP([.K210];[$種類番号.$A$1:$種類番号.$B$4];2;0)" office:value-type="float" office:value="4" calcext:value-type="float">
            <text:p>4</text:p>
          </table:table-cell>
          <table:table-cell office:value-type="string" calcext:value-type="string">
            <text:p>緑黄</text:p>
          </table:table-cell>
          <table:table-cell table:formula="of:=VLOOKUP([.M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0];[$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IF(ISNA([.$S210]);&quot;null&quot;;&quot;&quot;&quot;&quot;&amp;[.$S210]&amp;&quot;&quot;&quot;&quot;);[$JSON.$E$1];[.$U210];[$JSON.$F$1];IF(ISNA([.$W210]);&quot;null&quot;;&quot;&quot;&quot;&quot;&amp;[.$W210]&amp;&quot;&quot;&quot;&quot;);[$JSON.$G$1];[.$Y210];[$JSON.$H$1];[.$H210];[$JSON.$I$1];[.J210];[$JSON.$J$1];[.$L210];[$JSON.$K$1];[.$O210];[$JSON.$L$1];[.$N210];[$JSON.$M$1];[.$R210];[$JSON.$N$1];[.$T210];[$JSON.$O$1];IF(ISNA([.$V210]);&quot;null&quot;;[.$V210]);[$JSON.$P$1];[.$X210];[$JSON.$Q$1];[.$A210];[$JSON.$R$1];[.$B210];[$JSON.$S$1])" office:value-type="string" office:string-value="{&quot;id&quot;:&quot;2-77&quot;,&quot;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orderTable&quot;:209,&quot;orderDeck&quot;:374}," calcext:value-type="string">
            <text:p>{"id":"2-77","name":"GYマーブルストーン","kana":"gyまーぶるすとーん","traitText":null,"ruleText":"","legacyText":"復元","imageUrl":"https://one-draw.jp/ijinden/cardlist/002/card/02_077.png","expansion":25,"rarity":1,"type":4,"level":1,"color":44,"term":0,"trait":0,"power":null,"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G211];[$収録番号.$A$1:$収録番号.$B$9];2;0)" office:value-type="float" office:value="25" calcext:value-type="float">
            <text:p>25</text:p>
          </table:table-cell>
          <table:table-cell office:value-type="string" calcext:value-type="string">
            <text:p>R</text:p>
          </table:table-cell>
          <table:table-cell table:formula="of:=VLOOKUP([.I211];[$レアリティ番号.$A$1:$レアリティ番号.$B$4];2;0)" office:value-type="float" office:value="2" calcext:value-type="float">
            <text:p>2</text:p>
          </table:table-cell>
          <table:table-cell office:value-type="string" calcext:value-type="string">
            <text:p>マリョク</text:p>
          </table:table-cell>
          <table:table-cell table:formula="of:=VLOOKUP([.K211];[$種類番号.$A$1:$種類番号.$B$4];2;0)" office:value-type="float" office:value="4" calcext:value-type="float">
            <text:p>4</text:p>
          </table:table-cell>
          <table:table-cell office:value-type="string" calcext:value-type="string">
            <text:p>赤黄</text:p>
          </table:table-cell>
          <table:table-cell table:formula="of:=VLOOKUP([.M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IF(ISNA([.$S211]);&quot;null&quot;;&quot;&quot;&quot;&quot;&amp;[.$S211]&amp;&quot;&quot;&quot;&quot;);[$JSON.$E$1];[.$U211];[$JSON.$F$1];IF(ISNA([.$W211]);&quot;null&quot;;&quot;&quot;&quot;&quot;&amp;[.$W211]&amp;&quot;&quot;&quot;&quot;);[$JSON.$G$1];[.$Y211];[$JSON.$H$1];[.$H211];[$JSON.$I$1];[.J211];[$JSON.$J$1];[.$L211];[$JSON.$K$1];[.$O211];[$JSON.$L$1];[.$N211];[$JSON.$M$1];[.$R211];[$JSON.$N$1];[.$T211];[$JSON.$O$1];IF(ISNA([.$V211]);&quot;null&quot;;[.$V211]);[$JSON.$P$1];[.$X211];[$JSON.$Q$1];[.$A211];[$JSON.$R$1];[.$B211];[$JSON.$S$1])" office:value-type="string" office:string-value="{&quot;id&quot;:&quot;2-78&quot;,&quot;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orderTable&quot;:210,&quot;orderDeck&quot;:384}," calcext:value-type="string">
            <text:p>{"id":"2-78","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G212];[$収録番号.$A$1:$収録番号.$B$9];2;0)" office:value-type="float" office:value="25" calcext:value-type="float">
            <text:p>25</text:p>
          </table:table-cell>
          <table:table-cell office:value-type="string" calcext:value-type="string">
            <text:p>R</text:p>
          </table:table-cell>
          <table:table-cell table:formula="of:=VLOOKUP([.I212];[$レアリティ番号.$A$1:$レアリティ番号.$B$4];2;0)" office:value-type="float" office:value="2" calcext:value-type="float">
            <text:p>2</text:p>
          </table:table-cell>
          <table:table-cell office:value-type="string" calcext:value-type="string">
            <text:p>マリョク</text:p>
          </table:table-cell>
          <table:table-cell table:formula="of:=VLOOKUP([.K212];[$種類番号.$A$1:$種類番号.$B$4];2;0)" office:value-type="float" office:value="4" calcext:value-type="float">
            <text:p>4</text:p>
          </table:table-cell>
          <table:table-cell office:value-type="string" calcext:value-type="string">
            <text:p>青黄</text:p>
          </table:table-cell>
          <table:table-cell table:formula="of:=VLOOKUP([.M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IF(ISNA([.$S212]);&quot;null&quot;;&quot;&quot;&quot;&quot;&amp;[.$S212]&amp;&quot;&quot;&quot;&quot;);[$JSON.$E$1];[.$U212];[$JSON.$F$1];IF(ISNA([.$W212]);&quot;null&quot;;&quot;&quot;&quot;&quot;&amp;[.$W212]&amp;&quot;&quot;&quot;&quot;);[$JSON.$G$1];[.$Y212];[$JSON.$H$1];[.$H212];[$JSON.$I$1];[.J212];[$JSON.$J$1];[.$L212];[$JSON.$K$1];[.$O212];[$JSON.$L$1];[.$N212];[$JSON.$M$1];[.$R212];[$JSON.$N$1];[.$T212];[$JSON.$O$1];IF(ISNA([.$V212]);&quot;null&quot;;[.$V212]);[$JSON.$P$1];[.$X212];[$JSON.$Q$1];[.$A212];[$JSON.$R$1];[.$B212];[$JSON.$S$1])" office:value-type="string" office:string-value="{&quot;id&quot;:&quot;2-79&quot;,&quot;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orderTable&quot;:211,&quot;orderDeck&quot;:385}," calcext:value-type="string">
            <text:p>{"id":"2-79","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G213];[$収録番号.$A$1:$収録番号.$B$9];2;0)" office:value-type="float" office:value="25" calcext:value-type="float">
            <text:p>25</text:p>
          </table:table-cell>
          <table:table-cell office:value-type="string" calcext:value-type="string">
            <text:p>R</text:p>
          </table:table-cell>
          <table:table-cell table:formula="of:=VLOOKUP([.I213];[$レアリティ番号.$A$1:$レアリティ番号.$B$4];2;0)" office:value-type="float" office:value="2" calcext:value-type="float">
            <text:p>2</text:p>
          </table:table-cell>
          <table:table-cell office:value-type="string" calcext:value-type="string">
            <text:p>マリョク</text:p>
          </table:table-cell>
          <table:table-cell table:formula="of:=VLOOKUP([.K213];[$種類番号.$A$1:$種類番号.$B$4];2;0)" office:value-type="float" office:value="4" calcext:value-type="float">
            <text:p>4</text:p>
          </table:table-cell>
          <table:table-cell office:value-type="string" calcext:value-type="string">
            <text:p>緑黄</text:p>
          </table:table-cell>
          <table:table-cell table:formula="of:=VLOOKUP([.M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IF(ISNA([.$S213]);&quot;null&quot;;&quot;&quot;&quot;&quot;&amp;[.$S213]&amp;&quot;&quot;&quot;&quot;);[$JSON.$E$1];[.$U213];[$JSON.$F$1];IF(ISNA([.$W213]);&quot;null&quot;;&quot;&quot;&quot;&quot;&amp;[.$W213]&amp;&quot;&quot;&quot;&quot;);[$JSON.$G$1];[.$Y213];[$JSON.$H$1];[.$H213];[$JSON.$I$1];[.J213];[$JSON.$J$1];[.$L213];[$JSON.$K$1];[.$O213];[$JSON.$L$1];[.$N213];[$JSON.$M$1];[.$R213];[$JSON.$N$1];[.$T213];[$JSON.$O$1];IF(ISNA([.$V213]);&quot;null&quot;;[.$V213]);[$JSON.$P$1];[.$X213];[$JSON.$Q$1];[.$A213];[$JSON.$R$1];[.$B213];[$JSON.$S$1])" office:value-type="string" office:string-value="{&quot;id&quot;:&quot;2-80&quot;,&quot;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orderTable&quot;:212,&quot;orderDeck&quot;:386}," calcext:value-type="string">
            <text:p>{"id":"2-80","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G214];[$収録番号.$A$1:$収録番号.$B$9];2;0)" office:value-type="float" office:value="30" calcext:value-type="float">
            <text:p>30</text:p>
          </table:table-cell>
          <table:table-cell office:value-type="string" calcext:value-type="string">
            <text:p>SR</text:p>
          </table:table-cell>
          <table:table-cell table:formula="of:=VLOOKUP([.I214];[$レアリティ番号.$A$1:$レアリティ番号.$B$4];2;0)" office:value-type="float" office:value="4" calcext:value-type="float">
            <text:p>4</text:p>
          </table:table-cell>
          <table:table-cell office:value-type="string" calcext:value-type="string">
            <text:p>イジン</text:p>
          </table:table-cell>
          <table:table-cell table:formula="of:=VLOOKUP([.K214];[$種類番号.$A$1:$種類番号.$B$4];2;0)" office:value-type="float" office:value="1" calcext:value-type="float">
            <text:p>1</text:p>
          </table:table-cell>
          <table:table-cell office:value-type="string" calcext:value-type="string">
            <text:p>紫</text:p>
          </table:table-cell>
          <table:table-cell table:formula="of:=VLOOKUP([.M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float" office:value="4000" calcext:value-type="float">
            <text:p>4000</text:p>
          </table:table-cell>
          <table:table-cell office:value-type="string" calcext:value-type="string">
            <text:p>木霊</text:p>
          </table:table-cell>
          <table:table-cell table:formula="of:=IFERROR(VLOOKUP([.$W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IF(ISNA([.$S214]);&quot;null&quot;;&quot;&quot;&quot;&quot;&amp;[.$S214]&amp;&quot;&quot;&quot;&quot;);[$JSON.$E$1];[.$U214];[$JSON.$F$1];IF(ISNA([.$W214]);&quot;null&quot;;&quot;&quot;&quot;&quot;&amp;[.$W214]&amp;&quot;&quot;&quot;&quot;);[$JSON.$G$1];[.$Y214];[$JSON.$H$1];[.$H214];[$JSON.$I$1];[.J214];[$JSON.$J$1];[.$L214];[$JSON.$K$1];[.$O214];[$JSON.$L$1];[.$N214];[$JSON.$M$1];[.$R214];[$JSON.$N$1];[.$T214];[$JSON.$O$1];IF(ISNA([.$V214]);&quot;null&quot;;[.$V214]);[$JSON.$P$1];[.$X214];[$JSON.$Q$1];[.$A214];[$JSON.$R$1];[.$B214];[$JSON.$S$1])" office:value-type="string" office:string-value="{&quot;id&quot;:&quot;P-1&quot;,&quot;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orderTable&quot;:213,&quot;orderDeck&quot;:139}," calcext:value-type="string">
            <text:p>{"id":"P-1","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G215];[$収録番号.$A$1:$収録番号.$B$9];2;0)" office:value-type="float" office:value="30" calcext:value-type="float">
            <text:p>30</text:p>
          </table:table-cell>
          <table:table-cell office:value-type="string" calcext:value-type="string">
            <text:p>N</text:p>
          </table:table-cell>
          <table:table-cell table:formula="of:=VLOOKUP([.I215];[$レアリティ番号.$A$1:$レアリティ番号.$B$4];2;0)" office:value-type="float" office:value="1" calcext:value-type="float">
            <text:p>1</text:p>
          </table:table-cell>
          <table:table-cell office:value-type="string" calcext:value-type="string">
            <text:p>イジン</text:p>
          </table:table-cell>
          <table:table-cell table:formula="of:=VLOOKUP([.K215];[$種類番号.$A$1:$種類番号.$B$4];2;0)" office:value-type="float" office:value="1" calcext:value-type="float">
            <text:p>1</text:p>
          </table:table-cell>
          <table:table-cell office:value-type="string" calcext:value-type="string">
            <text:p>紫</text:p>
          </table:table-cell>
          <table:table-cell table:formula="of:=VLOOKUP([.M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float" office:value="1000" calcext:value-type="float">
            <text:p>1000</text:p>
          </table:table-cell>
          <table:table-cell office:value-type="string" calcext:value-type="string">
            <text:p>魔力化</text:p>
          </table:table-cell>
          <table:table-cell table:formula="of:=IFERROR(VLOOKUP([.$W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IF(ISNA([.$S215]);&quot;null&quot;;&quot;&quot;&quot;&quot;&amp;[.$S215]&amp;&quot;&quot;&quot;&quot;);[$JSON.$E$1];[.$U215];[$JSON.$F$1];IF(ISNA([.$W215]);&quot;null&quot;;&quot;&quot;&quot;&quot;&amp;[.$W215]&amp;&quot;&quot;&quot;&quot;);[$JSON.$G$1];[.$Y215];[$JSON.$H$1];[.$H215];[$JSON.$I$1];[.J215];[$JSON.$J$1];[.$L215];[$JSON.$K$1];[.$O215];[$JSON.$L$1];[.$N215];[$JSON.$M$1];[.$R215];[$JSON.$N$1];[.$T215];[$JSON.$O$1];IF(ISNA([.$V215]);&quot;null&quot;;[.$V215]);[$JSON.$P$1];[.$X215];[$JSON.$Q$1];[.$A215];[$JSON.$R$1];[.$B215];[$JSON.$S$1])" office:value-type="string" office:string-value="{&quot;id&quot;:&quot;P-2&quot;,&quot;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orderTable&quot;:214,&quot;orderDeck&quot;:20}," calcext:value-type="string">
            <text:p>{"id":"P-2","name":"篤姫","kana":"あつひめ","traitText":null,"ruleText":"戦場に置かれたとき、戦場の裏のカード1つの表を見る。","legacyText":"魔力化","imageUrl":"https://one-draw.jp/ijinden/cardlist/P01/card/03_P_002.png","expansion":30,"rarity":1,"type":1,"level":1,"color":16,"term":0,"trait":0,"power":100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G216];[$収録番号.$A$1:$収録番号.$B$9];2;0)" office:value-type="float" office:value="30" calcext:value-type="float">
            <text:p>30</text:p>
          </table:table-cell>
          <table:table-cell office:value-type="string" calcext:value-type="string">
            <text:p>N</text:p>
          </table:table-cell>
          <table:table-cell table:formula="of:=VLOOKUP([.I216];[$レアリティ番号.$A$1:$レアリティ番号.$B$4];2;0)" office:value-type="float" office:value="1" calcext:value-type="float">
            <text:p>1</text:p>
          </table:table-cell>
          <table:table-cell office:value-type="string" calcext:value-type="string">
            <text:p>イジン</text:p>
          </table:table-cell>
          <table:table-cell table:formula="of:=VLOOKUP([.K216];[$種類番号.$A$1:$種類番号.$B$4];2;0)" office:value-type="float" office:value="1" calcext:value-type="float">
            <text:p>1</text:p>
          </table:table-cell>
          <table:table-cell office:value-type="string" calcext:value-type="string">
            <text:p>紫</text:p>
          </table:table-cell>
          <table:table-cell table:formula="of:=VLOOKUP([.M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float" office:value="1000" calcext:value-type="float">
            <text:p>1000</text:p>
          </table:table-cell>
          <table:table-cell office:value-type="string" calcext:value-type="string">
            <text:p>1ドローする</text:p>
          </table:table-cell>
          <table:table-cell table:formula="of:=IFERROR(VLOOKUP([.$W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IF(ISNA([.$S216]);&quot;null&quot;;&quot;&quot;&quot;&quot;&amp;[.$S216]&amp;&quot;&quot;&quot;&quot;);[$JSON.$E$1];[.$U216];[$JSON.$F$1];IF(ISNA([.$W216]);&quot;null&quot;;&quot;&quot;&quot;&quot;&amp;[.$W216]&amp;&quot;&quot;&quot;&quot;);[$JSON.$G$1];[.$Y216];[$JSON.$H$1];[.$H216];[$JSON.$I$1];[.J216];[$JSON.$J$1];[.$L216];[$JSON.$K$1];[.$O216];[$JSON.$L$1];[.$N216];[$JSON.$M$1];[.$R216];[$JSON.$N$1];[.$T216];[$JSON.$O$1];IF(ISNA([.$V216]);&quot;null&quot;;[.$V216]);[$JSON.$P$1];[.$X216];[$JSON.$Q$1];[.$A216];[$JSON.$R$1];[.$B216];[$JSON.$S$1])" office:value-type="string" office:string-value="{&quot;id&quot;:&quot;P-3&quot;,&quot;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orderTable&quot;:215,&quot;orderDeck&quot;:58}," calcext:value-type="string">
            <text:p>{"id":"P-3","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G217];[$収録番号.$A$1:$収録番号.$B$9];2;0)" office:value-type="float" office:value="30" calcext:value-type="float">
            <text:p>30</text:p>
          </table:table-cell>
          <table:table-cell office:value-type="string" calcext:value-type="string">
            <text:p>N</text:p>
          </table:table-cell>
          <table:table-cell table:formula="of:=VLOOKUP([.I217];[$レアリティ番号.$A$1:$レアリティ番号.$B$4];2;0)" office:value-type="float" office:value="1" calcext:value-type="float">
            <text:p>1</text:p>
          </table:table-cell>
          <table:table-cell office:value-type="string" calcext:value-type="string">
            <text:p>イジン</text:p>
          </table:table-cell>
          <table:table-cell table:formula="of:=VLOOKUP([.K217];[$種類番号.$A$1:$種類番号.$B$4];2;0)" office:value-type="float" office:value="1" calcext:value-type="float">
            <text:p>1</text:p>
          </table:table-cell>
          <table:table-cell office:value-type="string" calcext:value-type="string">
            <text:p>紫</text:p>
          </table:table-cell>
          <table:table-cell table:formula="of:=VLOOKUP([.M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7];[$能力語番号.$A$1:$能力語番号.$B$10];2;0);0)" office:value-type="float" office:value="0" calcext:value-type="float">
            <text:p>0</text:p>
          </table:table-cell>
          <table:table-cell office:value-type="string" calcext:value-type="string">
            <text:p>医術</text:p>
          </table:table-cell>
          <table:table-cell table:formula="of:=IFERROR(VLOOKUP([.$S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office:value-type="float" office:value="4000" calcext:value-type="float">
            <text:p>4000</text:p>
          </table:table-cell>
          <table:table-cell table:formula="of:=NA()" office:value-type="string" office:string-value="" calcext:value-type="error">
            <text:p>#N/A</text:p>
          </table:table-cell>
          <table:table-cell table:formula="of:=IFERROR(VLOOKUP([.$W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IF(ISNA([.$S217]);&quot;null&quot;;&quot;&quot;&quot;&quot;&amp;[.$S217]&amp;&quot;&quot;&quot;&quot;);[$JSON.$E$1];[.$U217];[$JSON.$F$1];IF(ISNA([.$W217]);&quot;null&quot;;&quot;&quot;&quot;&quot;&amp;[.$W217]&amp;&quot;&quot;&quot;&quot;);[$JSON.$G$1];[.$Y217];[$JSON.$H$1];[.$H217];[$JSON.$I$1];[.J217];[$JSON.$J$1];[.$L217];[$JSON.$K$1];[.$O217];[$JSON.$L$1];[.$N217];[$JSON.$M$1];[.$R217];[$JSON.$N$1];[.$T217];[$JSON.$O$1];IF(ISNA([.$V217]);&quot;null&quot;;[.$V217]);[$JSON.$P$1];[.$X217];[$JSON.$Q$1];[.$A217];[$JSON.$R$1];[.$B217];[$JSON.$S$1])" office:value-type="string" office:string-value="{&quot;id&quot;:&quot;P-4&quot;,&quot;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orderTable&quot;:216,&quot;orderDeck&quot;:140}," calcext:value-type="string">
            <text:p>{"id":"P-4","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G218];[$収録番号.$A$1:$収録番号.$B$9];2;0)" office:value-type="float" office:value="30" calcext:value-type="float">
            <text:p>30</text:p>
          </table:table-cell>
          <table:table-cell office:value-type="string" calcext:value-type="string">
            <text:p>N</text:p>
          </table:table-cell>
          <table:table-cell table:formula="of:=VLOOKUP([.I218];[$レアリティ番号.$A$1:$レアリティ番号.$B$4];2;0)" office:value-type="float" office:value="1" calcext:value-type="float">
            <text:p>1</text:p>
          </table:table-cell>
          <table:table-cell office:value-type="string" calcext:value-type="string">
            <text:p>イジン</text:p>
          </table:table-cell>
          <table:table-cell table:formula="of:=VLOOKUP([.K218];[$種類番号.$A$1:$種類番号.$B$4];2;0)" office:value-type="float" office:value="1" calcext:value-type="float">
            <text:p>1</text:p>
          </table:table-cell>
          <table:table-cell office:value-type="string" calcext:value-type="string">
            <text:p>紫</text:p>
          </table:table-cell>
          <table:table-cell table:formula="of:=VLOOKUP([.M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8];[$能力語番号.$A$1:$能力語番号.$B$10];2;0);0)" office:value-type="float" office:value="0" calcext:value-type="float">
            <text:p>0</text:p>
          </table:table-cell>
          <table:table-cell office:value-type="string" calcext:value-type="string">
            <text:p>美術</text:p>
          </table:table-cell>
          <table:table-cell table:formula="of:=IFERROR(VLOOKUP([.$S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office:value-type="float" office:value="500" calcext:value-type="float">
            <text:p>500</text:p>
          </table:table-cell>
          <table:table-cell table:formula="of:=NA()" office:value-type="string" office:string-value="" calcext:value-type="error">
            <text:p>#N/A</text:p>
          </table:table-cell>
          <table:table-cell table:formula="of:=IFERROR(VLOOKUP([.$W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IF(ISNA([.$S218]);&quot;null&quot;;&quot;&quot;&quot;&quot;&amp;[.$S218]&amp;&quot;&quot;&quot;&quot;);[$JSON.$E$1];[.$U218];[$JSON.$F$1];IF(ISNA([.$W218]);&quot;null&quot;;&quot;&quot;&quot;&quot;&amp;[.$W218]&amp;&quot;&quot;&quot;&quot;);[$JSON.$G$1];[.$Y218];[$JSON.$H$1];[.$H218];[$JSON.$I$1];[.J218];[$JSON.$J$1];[.$L218];[$JSON.$K$1];[.$O218];[$JSON.$L$1];[.$N218];[$JSON.$M$1];[.$R218];[$JSON.$N$1];[.$T218];[$JSON.$O$1];IF(ISNA([.$V218]);&quot;null&quot;;[.$V218]);[$JSON.$P$1];[.$X218];[$JSON.$Q$1];[.$A218];[$JSON.$R$1];[.$B218];[$JSON.$S$1])" office:value-type="string" office:string-value="{&quot;id&quot;:&quot;P-5&quot;,&quot;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orderTable&quot;:217,&quot;orderDeck&quot;:59}," calcext:value-type="string">
            <text:p>{"id":"P-5","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G219];[$収録番号.$A$1:$収録番号.$B$9];2;0)" office:value-type="float" office:value="30" calcext:value-type="float">
            <text:p>30</text:p>
          </table:table-cell>
          <table:table-cell office:value-type="string" calcext:value-type="string">
            <text:p>N</text:p>
          </table:table-cell>
          <table:table-cell table:formula="of:=VLOOKUP([.I219];[$レアリティ番号.$A$1:$レアリティ番号.$B$4];2;0)" office:value-type="float" office:value="1" calcext:value-type="float">
            <text:p>1</text:p>
          </table:table-cell>
          <table:table-cell office:value-type="string" calcext:value-type="string">
            <text:p>イジン</text:p>
          </table:table-cell>
          <table:table-cell table:formula="of:=VLOOKUP([.K219];[$種類番号.$A$1:$種類番号.$B$4];2;0)" office:value-type="float" office:value="1" calcext:value-type="float">
            <text:p>1</text:p>
          </table:table-cell>
          <table:table-cell office:value-type="string" calcext:value-type="string">
            <text:p>紫</text:p>
          </table:table-cell>
          <table:table-cell table:formula="of:=VLOOKUP([.M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19];[$能力語番号.$A$1:$能力語番号.$B$10];2;0);0)" office:value-type="float" office:value="0" calcext:value-type="float">
            <text:p>0</text:p>
          </table:table-cell>
          <table:table-cell office:value-type="string" calcext:value-type="string">
            <text:p>医術</text:p>
          </table:table-cell>
          <table:table-cell table:formula="of:=IFERROR(VLOOKUP([.$S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float" office:value="2500" calcext:value-type="float">
            <text:p>2500</text:p>
          </table:table-cell>
          <table:table-cell office:value-type="string" calcext:value-type="string">
            <text:p>木霊</text:p>
          </table:table-cell>
          <table:table-cell table:formula="of:=IFERROR(VLOOKUP([.$W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IF(ISNA([.$S219]);&quot;null&quot;;&quot;&quot;&quot;&quot;&amp;[.$S219]&amp;&quot;&quot;&quot;&quot;);[$JSON.$E$1];[.$U219];[$JSON.$F$1];IF(ISNA([.$W219]);&quot;null&quot;;&quot;&quot;&quot;&quot;&amp;[.$W219]&amp;&quot;&quot;&quot;&quot;);[$JSON.$G$1];[.$Y219];[$JSON.$H$1];[.$H219];[$JSON.$I$1];[.J219];[$JSON.$J$1];[.$L219];[$JSON.$K$1];[.$O219];[$JSON.$L$1];[.$N219];[$JSON.$M$1];[.$R219];[$JSON.$N$1];[.$T219];[$JSON.$O$1];IF(ISNA([.$V219]);&quot;null&quot;;[.$V219]);[$JSON.$P$1];[.$X219];[$JSON.$Q$1];[.$A219];[$JSON.$R$1];[.$B219];[$JSON.$S$1])" office:value-type="string" office:string-value="{&quot;id&quot;:&quot;P-6&quot;,&quot;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orderTable&quot;:218,&quot;orderDeck&quot;:101}," calcext:value-type="string">
            <text:p>{"id":"P-6","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G220];[$収録番号.$A$1:$収録番号.$B$9];2;0)" office:value-type="float" office:value="30" calcext:value-type="float">
            <text:p>30</text:p>
          </table:table-cell>
          <table:table-cell office:value-type="string" calcext:value-type="string">
            <text:p>N</text:p>
          </table:table-cell>
          <table:table-cell table:formula="of:=VLOOKUP([.I220];[$レアリティ番号.$A$1:$レアリティ番号.$B$4];2;0)" office:value-type="float" office:value="1" calcext:value-type="float">
            <text:p>1</text:p>
          </table:table-cell>
          <table:table-cell office:value-type="string" calcext:value-type="string">
            <text:p>イジン</text:p>
          </table:table-cell>
          <table:table-cell table:formula="of:=VLOOKUP([.K220];[$種類番号.$A$1:$種類番号.$B$4];2;0)" office:value-type="float" office:value="1" calcext:value-type="float">
            <text:p>1</text:p>
          </table:table-cell>
          <table:table-cell office:value-type="string" calcext:value-type="string">
            <text:p>紫</text:p>
          </table:table-cell>
          <table:table-cell table:formula="of:=VLOOKUP([.M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0];[$能力語番号.$A$1:$能力語番号.$B$10];2;0);0)" office:value-type="float" office:value="0" calcext:value-type="float">
            <text:p>0</text:p>
          </table:table-cell>
          <table:table-cell office:value-type="string" calcext:value-type="string">
            <text:p>剣術</text:p>
          </table:table-cell>
          <table:table-cell table:formula="of:=IFERROR(VLOOKUP([.$S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office:value-type="float" office:value="2000" calcext:value-type="float">
            <text:p>2000</text:p>
          </table:table-cell>
          <table:table-cell table:formula="of:=NA()" office:value-type="string" office:string-value="" calcext:value-type="error">
            <text:p>#N/A</text:p>
          </table:table-cell>
          <table:table-cell table:formula="of:=IFERROR(VLOOKUP([.$W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IF(ISNA([.$S220]);&quot;null&quot;;&quot;&quot;&quot;&quot;&amp;[.$S220]&amp;&quot;&quot;&quot;&quot;);[$JSON.$E$1];[.$U220];[$JSON.$F$1];IF(ISNA([.$W220]);&quot;null&quot;;&quot;&quot;&quot;&quot;&amp;[.$W220]&amp;&quot;&quot;&quot;&quot;);[$JSON.$G$1];[.$Y220];[$JSON.$H$1];[.$H220];[$JSON.$I$1];[.J220];[$JSON.$J$1];[.$L220];[$JSON.$K$1];[.$O220];[$JSON.$L$1];[.$N220];[$JSON.$M$1];[.$R220];[$JSON.$N$1];[.$T220];[$JSON.$O$1];IF(ISNA([.$V220]);&quot;null&quot;;[.$V220]);[$JSON.$P$1];[.$X220];[$JSON.$Q$1];[.$A220];[$JSON.$R$1];[.$B220];[$JSON.$S$1])" office:value-type="string" office:string-value="{&quot;id&quot;:&quot;P-7&quot;,&quot;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orderTable&quot;:219,&quot;orderDeck&quot;:177}," calcext:value-type="string">
            <text:p>{"id":"P-7","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G221];[$収録番号.$A$1:$収録番号.$B$9];2;0)" office:value-type="float" office:value="30" calcext:value-type="float">
            <text:p>30</text:p>
          </table:table-cell>
          <table:table-cell office:value-type="string" calcext:value-type="string">
            <text:p>N</text:p>
          </table:table-cell>
          <table:table-cell table:formula="of:=VLOOKUP([.I221];[$レアリティ番号.$A$1:$レアリティ番号.$B$4];2;0)" office:value-type="float" office:value="1" calcext:value-type="float">
            <text:p>1</text:p>
          </table:table-cell>
          <table:table-cell office:value-type="string" calcext:value-type="string">
            <text:p>イジン</text:p>
          </table:table-cell>
          <table:table-cell table:formula="of:=VLOOKUP([.K221];[$種類番号.$A$1:$種類番号.$B$4];2;0)" office:value-type="float" office:value="1" calcext:value-type="float">
            <text:p>1</text:p>
          </table:table-cell>
          <table:table-cell office:value-type="string" calcext:value-type="string">
            <text:p>紫</text:p>
          </table:table-cell>
          <table:table-cell table:formula="of:=VLOOKUP([.M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1];[$能力語番号.$A$1:$能力語番号.$B$10];2;0);0)" office:value-type="float" office:value="0" calcext:value-type="float">
            <text:p>0</text:p>
          </table:table-cell>
          <table:table-cell office:value-type="string" calcext:value-type="string">
            <text:p>医術</text:p>
          </table:table-cell>
          <table:table-cell table:formula="of:=IFERROR(VLOOKUP([.$S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office:value-type="float" office:value="3000" calcext:value-type="float">
            <text:p>3000</text:p>
          </table:table-cell>
          <table:table-cell table:formula="of:=NA()" office:value-type="string" office:string-value="" calcext:value-type="error">
            <text:p>#N/A</text:p>
          </table:table-cell>
          <table:table-cell table:formula="of:=IFERROR(VLOOKUP([.$W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IF(ISNA([.$S221]);&quot;null&quot;;&quot;&quot;&quot;&quot;&amp;[.$S221]&amp;&quot;&quot;&quot;&quot;);[$JSON.$E$1];[.$U221];[$JSON.$F$1];IF(ISNA([.$W221]);&quot;null&quot;;&quot;&quot;&quot;&quot;&amp;[.$W221]&amp;&quot;&quot;&quot;&quot;);[$JSON.$G$1];[.$Y221];[$JSON.$H$1];[.$H221];[$JSON.$I$1];[.J221];[$JSON.$J$1];[.$L221];[$JSON.$K$1];[.$O221];[$JSON.$L$1];[.$N221];[$JSON.$M$1];[.$R221];[$JSON.$N$1];[.$T221];[$JSON.$O$1];IF(ISNA([.$V221]);&quot;null&quot;;[.$V221]);[$JSON.$P$1];[.$X221];[$JSON.$Q$1];[.$A221];[$JSON.$R$1];[.$B221];[$JSON.$S$1])" office:value-type="string" office:string-value="{&quot;id&quot;:&quot;P-8&quot;,&quot;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orderTable&quot;:220,&quot;orderDeck&quot;:102}," calcext:value-type="string">
            <text:p>{"id":"P-8","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G222];[$収録番号.$A$1:$収録番号.$B$9];2;0)" office:value-type="float" office:value="30" calcext:value-type="float">
            <text:p>30</text:p>
          </table:table-cell>
          <table:table-cell office:value-type="string" calcext:value-type="string">
            <text:p>N</text:p>
          </table:table-cell>
          <table:table-cell table:formula="of:=VLOOKUP([.I222];[$レアリティ番号.$A$1:$レアリティ番号.$B$4];2;0)" office:value-type="float" office:value="1" calcext:value-type="float">
            <text:p>1</text:p>
          </table:table-cell>
          <table:table-cell office:value-type="string" calcext:value-type="string">
            <text:p>ハイケイ</text:p>
          </table:table-cell>
          <table:table-cell table:formula="of:=VLOOKUP([.K222];[$種類番号.$A$1:$種類番号.$B$4];2;0)" office:value-type="float" office:value="2" calcext:value-type="float">
            <text:p>2</text:p>
          </table:table-cell>
          <table:table-cell office:value-type="string" calcext:value-type="string">
            <text:p>紫</text:p>
          </table:table-cell>
          <table:table-cell table:formula="of:=VLOOKUP([.M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formula="of:=NA()" office:value-type="string" office:string-value="" calcext:value-type="error">
            <text:p>#N/A</text:p>
          </table:table-cell>
          <table:table-cell office:value-type="string" calcext:value-type="string">
            <text:p>手札に戻す</text:p>
          </table:table-cell>
          <table:table-cell table:formula="of:=IFERROR(VLOOKUP([.$W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IF(ISNA([.$S222]);&quot;null&quot;;&quot;&quot;&quot;&quot;&amp;[.$S222]&amp;&quot;&quot;&quot;&quot;);[$JSON.$E$1];[.$U222];[$JSON.$F$1];IF(ISNA([.$W222]);&quot;null&quot;;&quot;&quot;&quot;&quot;&amp;[.$W222]&amp;&quot;&quot;&quot;&quot;);[$JSON.$G$1];[.$Y222];[$JSON.$H$1];[.$H222];[$JSON.$I$1];[.J222];[$JSON.$J$1];[.$L222];[$JSON.$K$1];[.$O222];[$JSON.$L$1];[.$N222];[$JSON.$M$1];[.$R222];[$JSON.$N$1];[.$T222];[$JSON.$O$1];IF(ISNA([.$V222]);&quot;null&quot;;[.$V222]);[$JSON.$P$1];[.$X222];[$JSON.$Q$1];[.$A222];[$JSON.$R$1];[.$B222];[$JSON.$S$1])" office:value-type="string" office:string-value="{&quot;id&quot;:&quot;P-9&quot;,&quot;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orderTable&quot;:221,&quot;orderDeck&quot;:277}," calcext:value-type="string">
            <text:p>{"id":"P-9","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G223];[$収録番号.$A$1:$収録番号.$B$9];2;0)" office:value-type="float" office:value="30" calcext:value-type="float">
            <text:p>30</text:p>
          </table:table-cell>
          <table:table-cell office:value-type="string" calcext:value-type="string">
            <text:p>N</text:p>
          </table:table-cell>
          <table:table-cell table:formula="of:=VLOOKUP([.I223];[$レアリティ番号.$A$1:$レアリティ番号.$B$4];2;0)" office:value-type="float" office:value="1" calcext:value-type="float">
            <text:p>1</text:p>
          </table:table-cell>
          <table:table-cell office:value-type="string" calcext:value-type="string">
            <text:p>ハイケイ</text:p>
          </table:table-cell>
          <table:table-cell table:formula="of:=VLOOKUP([.K223];[$種類番号.$A$1:$種類番号.$B$4];2;0)" office:value-type="float" office:value="2" calcext:value-type="float">
            <text:p>2</text:p>
          </table:table-cell>
          <table:table-cell office:value-type="string" calcext:value-type="string">
            <text:p>紫</text:p>
          </table:table-cell>
          <table:table-cell table:formula="of:=VLOOKUP([.M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W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IF(ISNA([.$S223]);&quot;null&quot;;&quot;&quot;&quot;&quot;&amp;[.$S223]&amp;&quot;&quot;&quot;&quot;);[$JSON.$E$1];[.$U223];[$JSON.$F$1];IF(ISNA([.$W223]);&quot;null&quot;;&quot;&quot;&quot;&quot;&amp;[.$W223]&amp;&quot;&quot;&quot;&quot;);[$JSON.$G$1];[.$Y223];[$JSON.$H$1];[.$H223];[$JSON.$I$1];[.J223];[$JSON.$J$1];[.$L223];[$JSON.$K$1];[.$O223];[$JSON.$L$1];[.$N223];[$JSON.$M$1];[.$R223];[$JSON.$N$1];[.$T223];[$JSON.$O$1];IF(ISNA([.$V223]);&quot;null&quot;;[.$V223]);[$JSON.$P$1];[.$X223];[$JSON.$Q$1];[.$A223];[$JSON.$R$1];[.$B223];[$JSON.$S$1])" office:value-type="string" office:string-value="{&quot;id&quot;:&quot;P-10&quot;,&quot;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orderTable&quot;:222,&quot;orderDeck&quot;:271}," calcext:value-type="string">
            <text:p>{"id":"P-10","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G224];[$収録番号.$A$1:$収録番号.$B$9];2;0)" office:value-type="float" office:value="30" calcext:value-type="float">
            <text:p>30</text:p>
          </table:table-cell>
          <table:table-cell office:value-type="string" calcext:value-type="string">
            <text:p>N</text:p>
          </table:table-cell>
          <table:table-cell table:formula="of:=VLOOKUP([.I224];[$レアリティ番号.$A$1:$レアリティ番号.$B$4];2;0)" office:value-type="float" office:value="1" calcext:value-type="float">
            <text:p>1</text:p>
          </table:table-cell>
          <table:table-cell office:value-type="string" calcext:value-type="string">
            <text:p>マホウ</text:p>
          </table:table-cell>
          <table:table-cell table:formula="of:=VLOOKUP([.K224];[$種類番号.$A$1:$種類番号.$B$4];2;0)" office:value-type="float" office:value="3" calcext:value-type="float">
            <text:p>3</text:p>
          </table:table-cell>
          <table:table-cell office:value-type="string" calcext:value-type="string">
            <text:p>紫</text:p>
          </table:table-cell>
          <table:table-cell table:formula="of:=VLOOKUP([.M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table:formula="of:=NA()" office:value-type="string" office:string-value="" calcext:value-type="error">
            <text:p>#N/A</text:p>
          </table:table-cell>
          <table:table-cell office:value-type="string" calcext:value-type="string">
            <text:p>魔力化</text:p>
          </table:table-cell>
          <table:table-cell table:formula="of:=IFERROR(VLOOKUP([.$W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IF(ISNA([.$S224]);&quot;null&quot;;&quot;&quot;&quot;&quot;&amp;[.$S224]&amp;&quot;&quot;&quot;&quot;);[$JSON.$E$1];[.$U224];[$JSON.$F$1];IF(ISNA([.$W224]);&quot;null&quot;;&quot;&quot;&quot;&quot;&amp;[.$W224]&amp;&quot;&quot;&quot;&quot;);[$JSON.$G$1];[.$Y224];[$JSON.$H$1];[.$H224];[$JSON.$I$1];[.J224];[$JSON.$J$1];[.$L224];[$JSON.$K$1];[.$O224];[$JSON.$L$1];[.$N224];[$JSON.$M$1];[.$R224];[$JSON.$N$1];[.$T224];[$JSON.$O$1];IF(ISNA([.$V224]);&quot;null&quot;;[.$V224]);[$JSON.$P$1];[.$X224];[$JSON.$Q$1];[.$A224];[$JSON.$R$1];[.$B224];[$JSON.$S$1])" office:value-type="string" office:string-value="{&quot;id&quot;:&quot;P-11&quot;,&quot;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orderTable&quot;:223,&quot;orderDeck&quot;:286}," calcext:value-type="string">
            <text:p>{"id":"P-11","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G225];[$収録番号.$A$1:$収録番号.$B$9];2;0)" office:value-type="float" office:value="30" calcext:value-type="float">
            <text:p>30</text:p>
          </table:table-cell>
          <table:table-cell office:value-type="string" calcext:value-type="string">
            <text:p>N</text:p>
          </table:table-cell>
          <table:table-cell table:formula="of:=VLOOKUP([.I225];[$レアリティ番号.$A$1:$レアリティ番号.$B$4];2;0)" office:value-type="float" office:value="1" calcext:value-type="float">
            <text:p>1</text:p>
          </table:table-cell>
          <table:table-cell office:value-type="string" calcext:value-type="string">
            <text:p>マホウ</text:p>
          </table:table-cell>
          <table:table-cell table:formula="of:=VLOOKUP([.K225];[$種類番号.$A$1:$種類番号.$B$4];2;0)" office:value-type="float" office:value="3" calcext:value-type="float">
            <text:p>3</text:p>
          </table:table-cell>
          <table:table-cell office:value-type="string" calcext:value-type="string">
            <text:p>紫</text:p>
          </table:table-cell>
          <table:table-cell table:formula="of:=VLOOKUP([.M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table:formula="of:=NA()" office:value-type="string" office:string-value="" calcext:value-type="error">
            <text:p>#N/A</text:p>
          </table:table-cell>
          <table:table-cell office:value-type="string" calcext:value-type="string">
            <text:p>冥府発動</text:p>
          </table:table-cell>
          <table:table-cell table:formula="of:=IFERROR(VLOOKUP([.$W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IF(ISNA([.$S225]);&quot;null&quot;;&quot;&quot;&quot;&quot;&amp;[.$S225]&amp;&quot;&quot;&quot;&quot;);[$JSON.$E$1];[.$U225];[$JSON.$F$1];IF(ISNA([.$W225]);&quot;null&quot;;&quot;&quot;&quot;&quot;&amp;[.$W225]&amp;&quot;&quot;&quot;&quot;);[$JSON.$G$1];[.$Y225];[$JSON.$H$1];[.$H225];[$JSON.$I$1];[.J225];[$JSON.$J$1];[.$L225];[$JSON.$K$1];[.$O225];[$JSON.$L$1];[.$N225];[$JSON.$M$1];[.$R225];[$JSON.$N$1];[.$T225];[$JSON.$O$1];IF(ISNA([.$V225]);&quot;null&quot;;[.$V225]);[$JSON.$P$1];[.$X225];[$JSON.$Q$1];[.$A225];[$JSON.$R$1];[.$B225];[$JSON.$S$1])" office:value-type="string" office:string-value="{&quot;id&quot;:&quot;P-12&quot;,&quot;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orderTable&quot;:224,&quot;orderDeck&quot;:324}," calcext:value-type="string">
            <text:p>{"id":"P-12","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G226];[$収録番号.$A$1:$収録番号.$B$9];2;0)" office:value-type="float" office:value="30" calcext:value-type="float">
            <text:p>30</text:p>
          </table:table-cell>
          <table:table-cell office:value-type="string" calcext:value-type="string">
            <text:p>N</text:p>
          </table:table-cell>
          <table:table-cell table:formula="of:=VLOOKUP([.I226];[$レアリティ番号.$A$1:$レアリティ番号.$B$4];2;0)" office:value-type="float" office:value="1" calcext:value-type="float">
            <text:p>1</text:p>
          </table:table-cell>
          <table:table-cell office:value-type="string" calcext:value-type="string">
            <text:p>マリョク</text:p>
          </table:table-cell>
          <table:table-cell table:formula="of:=VLOOKUP([.K226];[$種類番号.$A$1:$種類番号.$B$4];2;0)" office:value-type="float" office:value="4" calcext:value-type="float">
            <text:p>4</text:p>
          </table:table-cell>
          <table:table-cell office:value-type="string" calcext:value-type="string">
            <text:p>紫</text:p>
          </table:table-cell>
          <table:table-cell table:formula="of:=VLOOKUP([.M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W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IF(ISNA([.$S226]);&quot;null&quot;;&quot;&quot;&quot;&quot;&amp;[.$S226]&amp;&quot;&quot;&quot;&quot;);[$JSON.$E$1];[.$U226];[$JSON.$F$1];IF(ISNA([.$W226]);&quot;null&quot;;&quot;&quot;&quot;&quot;&amp;[.$W226]&amp;&quot;&quot;&quot;&quot;);[$JSON.$G$1];[.$Y226];[$JSON.$H$1];[.$H226];[$JSON.$I$1];[.J226];[$JSON.$J$1];[.$L226];[$JSON.$K$1];[.$O226];[$JSON.$L$1];[.$N226];[$JSON.$M$1];[.$R226];[$JSON.$N$1];[.$T226];[$JSON.$O$1];IF(ISNA([.$V226]);&quot;null&quot;;[.$V226]);[$JSON.$P$1];[.$X226];[$JSON.$Q$1];[.$A226];[$JSON.$R$1];[.$B226];[$JSON.$S$1])" office:value-type="string" office:string-value="{&quot;id&quot;:&quot;P-13&quot;,&quot;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orderTable&quot;:225,&quot;orderDeck&quot;:366}," calcext:value-type="string">
            <text:p>{"id":"P-13","name":"ハンドミラー","kana":"はんどみらー","traitText":null,"ruleText":"魔力ゾーンに置かれたとき、1ドローする。","legacyText":null,"imageUrl":"https://one-draw.jp/ijinden/cardlist/P01/card/03_P_013.png","expansion":30,"rarity":1,"type":4,"level":1,"color":16,"term":0,"trait":0,"power":null,"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G227];[$収録番号.$A$1:$収録番号.$B$9];2;0)" office:value-type="float" office:value="30" calcext:value-type="float">
            <text:p>30</text:p>
          </table:table-cell>
          <table:table-cell office:value-type="string" calcext:value-type="string">
            <text:p>N</text:p>
          </table:table-cell>
          <table:table-cell table:formula="of:=VLOOKUP([.I227];[$レアリティ番号.$A$1:$レアリティ番号.$B$4];2;0)" office:value-type="float" office:value="1" calcext:value-type="float">
            <text:p>1</text:p>
          </table:table-cell>
          <table:table-cell office:value-type="string" calcext:value-type="string">
            <text:p>マリョク</text:p>
          </table:table-cell>
          <table:table-cell table:formula="of:=VLOOKUP([.K227];[$種類番号.$A$1:$種類番号.$B$4];2;0)" office:value-type="float" office:value="4" calcext:value-type="float">
            <text:p>4</text:p>
          </table:table-cell>
          <table:table-cell office:value-type="string" calcext:value-type="string">
            <text:p>紫</text:p>
          </table:table-cell>
          <table:table-cell table:formula="of:=VLOOKUP([.M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IF(ISNA([.$S227]);&quot;null&quot;;&quot;&quot;&quot;&quot;&amp;[.$S227]&amp;&quot;&quot;&quot;&quot;);[$JSON.$E$1];[.$U227];[$JSON.$F$1];IF(ISNA([.$W227]);&quot;null&quot;;&quot;&quot;&quot;&quot;&amp;[.$W227]&amp;&quot;&quot;&quot;&quot;);[$JSON.$G$1];[.$Y227];[$JSON.$H$1];[.$H227];[$JSON.$I$1];[.J227];[$JSON.$J$1];[.$L227];[$JSON.$K$1];[.$O227];[$JSON.$L$1];[.$N227];[$JSON.$M$1];[.$R227];[$JSON.$N$1];[.$T227];[$JSON.$O$1];IF(ISNA([.$V227]);&quot;null&quot;;[.$V227]);[$JSON.$P$1];[.$X227];[$JSON.$Q$1];[.$A227];[$JSON.$R$1];[.$B227];[$JSON.$S$1])" office:value-type="string" office:string-value="{&quot;id&quot;:&quot;P-14&quot;,&quot;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orderTable&quot;:226,&quot;orderDeck&quot;:367}," calcext:value-type="string">
            <text:p>{"id":"P-14","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G228];[$収録番号.$A$1:$収録番号.$B$9];2;0)" office:value-type="float" office:value="30" calcext:value-type="float">
            <text:p>30</text:p>
          </table:table-cell>
          <table:table-cell office:value-type="string" calcext:value-type="string">
            <text:p>N</text:p>
          </table:table-cell>
          <table:table-cell table:formula="of:=VLOOKUP([.I228];[$レアリティ番号.$A$1:$レアリティ番号.$B$4];2;0)" office:value-type="float" office:value="1" calcext:value-type="float">
            <text:p>1</text:p>
          </table:table-cell>
          <table:table-cell office:value-type="string" calcext:value-type="string">
            <text:p>マリョク</text:p>
          </table:table-cell>
          <table:table-cell table:formula="of:=VLOOKUP([.K228];[$種類番号.$A$1:$種類番号.$B$4];2;0)" office:value-type="float" office:value="4" calcext:value-type="float">
            <text:p>4</text:p>
          </table:table-cell>
          <table:table-cell office:value-type="string" calcext:value-type="string">
            <text:p>紫</text:p>
          </table:table-cell>
          <table:table-cell table:formula="of:=VLOOKUP([.M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8];[$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IF(ISNA([.$S228]);&quot;null&quot;;&quot;&quot;&quot;&quot;&amp;[.$S228]&amp;&quot;&quot;&quot;&quot;);[$JSON.$E$1];[.$U228];[$JSON.$F$1];IF(ISNA([.$W228]);&quot;null&quot;;&quot;&quot;&quot;&quot;&amp;[.$W228]&amp;&quot;&quot;&quot;&quot;);[$JSON.$G$1];[.$Y228];[$JSON.$H$1];[.$H228];[$JSON.$I$1];[.J228];[$JSON.$J$1];[.$L228];[$JSON.$K$1];[.$O228];[$JSON.$L$1];[.$N228];[$JSON.$M$1];[.$R228];[$JSON.$N$1];[.$T228];[$JSON.$O$1];IF(ISNA([.$V228]);&quot;null&quot;;[.$V228]);[$JSON.$P$1];[.$X228];[$JSON.$Q$1];[.$A228];[$JSON.$R$1];[.$B228];[$JSON.$S$1])" office:value-type="string" office:string-value="{&quot;id&quot;:&quot;P-15&quot;,&quot;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orderTable&quot;:227,&quot;orderDeck&quot;:383}," calcext:value-type="string">
            <text:p>{"id":"P-15","name":"パープルオーブ","kana":"ぱーぷるおーぶ","traitText":null,"ruleText":"","legacyText":"復元","imageUrl":"https://one-draw.jp/ijinden/cardlist/P01/card/03_P_015.png","expansion":30,"rarity":1,"type":4,"level":2,"color":16,"term":0,"trait":0,"power":null,"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G229];[$収録番号.$A$1:$収録番号.$B$9];2;0)" office:value-type="float" office:value="30" calcext:value-type="float">
            <text:p>30</text:p>
          </table:table-cell>
          <table:table-cell office:value-type="string" calcext:value-type="string">
            <text:p>N</text:p>
          </table:table-cell>
          <table:table-cell table:formula="of:=VLOOKUP([.I229];[$レアリティ番号.$A$1:$レアリティ番号.$B$4];2;0)" office:value-type="float" office:value="1" calcext:value-type="float">
            <text:p>1</text:p>
          </table:table-cell>
          <table:table-cell office:value-type="string" calcext:value-type="string">
            <text:p>マリョク</text:p>
          </table:table-cell>
          <table:table-cell table:formula="of:=VLOOKUP([.K229];[$種類番号.$A$1:$種類番号.$B$4];2;0)" office:value-type="float" office:value="4" calcext:value-type="float">
            <text:p>4</text:p>
          </table:table-cell>
          <table:table-cell office:value-type="string" calcext:value-type="string">
            <text:p>紫</text:p>
          </table:table-cell>
          <table:table-cell table:formula="of:=VLOOKUP([.M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29];[$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IF(ISNA([.$S229]);&quot;null&quot;;&quot;&quot;&quot;&quot;&amp;[.$S229]&amp;&quot;&quot;&quot;&quot;);[$JSON.$E$1];[.$U229];[$JSON.$F$1];IF(ISNA([.$W229]);&quot;null&quot;;&quot;&quot;&quot;&quot;&amp;[.$W229]&amp;&quot;&quot;&quot;&quot;);[$JSON.$G$1];[.$Y229];[$JSON.$H$1];[.$H229];[$JSON.$I$1];[.J229];[$JSON.$J$1];[.$L229];[$JSON.$K$1];[.$O229];[$JSON.$L$1];[.$N229];[$JSON.$M$1];[.$R229];[$JSON.$N$1];[.$T229];[$JSON.$O$1];IF(ISNA([.$V229]);&quot;null&quot;;[.$V229]);[$JSON.$P$1];[.$X229];[$JSON.$Q$1];[.$A229];[$JSON.$R$1];[.$B229];[$JSON.$S$1])" office:value-type="string" office:string-value="{&quot;id&quot;:&quot;P-16&quot;,&quot;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orderTable&quot;:228,&quot;orderDeck&quot;:368}," calcext:value-type="string">
            <text:p>{"id":"P-16","name":"パープルストーン","kana":"ぱーぷるすとーん","traitText":null,"ruleText":"※デッキに何枚でも入れてよい。","legacyText":"復元","imageUrl":"https://one-draw.jp/ijinden/cardlist/P01/card/03_P_016.png","expansion":30,"rarity":1,"type":4,"level":1,"color":16,"term":0,"trait":0,"power":null,"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G230];[$収録番号.$A$1:$収録番号.$B$9];2;0)" office:value-type="float" office:value="35" calcext:value-type="float">
            <text:p>35</text:p>
          </table:table-cell>
          <table:table-cell office:value-type="string" calcext:value-type="string">
            <text:p>SR</text:p>
          </table:table-cell>
          <table:table-cell table:formula="of:=VLOOKUP([.I230];[$レアリティ番号.$A$1:$レアリティ番号.$B$4];2;0)" office:value-type="float" office:value="4" calcext:value-type="float">
            <text:p>4</text:p>
          </table:table-cell>
          <table:table-cell office:value-type="string" calcext:value-type="string">
            <text:p>イジン</text:p>
          </table:table-cell>
          <table:table-cell table:formula="of:=VLOOKUP([.K230];[$種類番号.$A$1:$種類番号.$B$4];2;0)" office:value-type="float" office:value="1" calcext:value-type="float">
            <text:p>1</text:p>
          </table:table-cell>
          <table:table-cell office:value-type="string" calcext:value-type="string">
            <text:p>赤</text:p>
          </table:table-cell>
          <table:table-cell table:formula="of:=VLOOKUP([.M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0];[$能力語番号.$A$1:$能力語番号.$B$10];2;0);0)" office:value-type="float" office:value="0" calcext:value-type="float">
            <text:p>0</text:p>
          </table:table-cell>
          <table:table-cell office:value-type="string" calcext:value-type="string">
            <text:p>剣術</text:p>
          </table:table-cell>
          <table:table-cell table:formula="of:=IFERROR(VLOOKUP([.$S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IF(ISNA([.$S230]);&quot;null&quot;;&quot;&quot;&quot;&quot;&amp;[.$S230]&amp;&quot;&quot;&quot;&quot;);[$JSON.$E$1];[.$U230];[$JSON.$F$1];IF(ISNA([.$W230]);&quot;null&quot;;&quot;&quot;&quot;&quot;&amp;[.$W230]&amp;&quot;&quot;&quot;&quot;);[$JSON.$G$1];[.$Y230];[$JSON.$H$1];[.$H230];[$JSON.$I$1];[.J230];[$JSON.$J$1];[.$L230];[$JSON.$K$1];[.$O230];[$JSON.$L$1];[.$N230];[$JSON.$M$1];[.$R230];[$JSON.$N$1];[.$T230];[$JSON.$O$1];IF(ISNA([.$V230]);&quot;null&quot;;[.$V230]);[$JSON.$P$1];[.$X230];[$JSON.$Q$1];[.$A230];[$JSON.$R$1];[.$B230];[$JSON.$S$1])" office:value-type="string" office:string-value="{&quot;id&quot;:&quot;3-1&quot;,&quot;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orderTable&quot;:229,&quot;orderDeck&quot;:150}," calcext:value-type="string">
            <text:p>{"id":"3-1","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G231];[$収録番号.$A$1:$収録番号.$B$9];2;0)" office:value-type="float" office:value="35" calcext:value-type="float">
            <text:p>35</text:p>
          </table:table-cell>
          <table:table-cell office:value-type="string" calcext:value-type="string">
            <text:p>SR</text:p>
          </table:table-cell>
          <table:table-cell table:formula="of:=VLOOKUP([.I231];[$レアリティ番号.$A$1:$レアリティ番号.$B$4];2;0)" office:value-type="float" office:value="4" calcext:value-type="float">
            <text:p>4</text:p>
          </table:table-cell>
          <table:table-cell office:value-type="string" calcext:value-type="string">
            <text:p>イジン</text:p>
          </table:table-cell>
          <table:table-cell table:formula="of:=VLOOKUP([.K231];[$種類番号.$A$1:$種類番号.$B$4];2;0)" office:value-type="float" office:value="1" calcext:value-type="float">
            <text:p>1</text:p>
          </table:table-cell>
          <table:table-cell office:value-type="string" calcext:value-type="string">
            <text:p>赤</text:p>
          </table:table-cell>
          <table:table-cell table:formula="of:=VLOOKUP([.M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office:value-type="float" office:value="2000" calcext:value-type="float">
            <text:p>2000</text:p>
          </table:table-cell>
          <table:table-cell table:style-name="ce8" office:value-type="string" calcext:value-type="string">
            <text:p>反魂</text:p>
          </table:table-cell>
          <table:table-cell table:formula="of:=IFERROR(VLOOKUP([.$W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IF(ISNA([.$S231]);&quot;null&quot;;&quot;&quot;&quot;&quot;&amp;[.$S231]&amp;&quot;&quot;&quot;&quot;);[$JSON.$E$1];[.$U231];[$JSON.$F$1];IF(ISNA([.$W231]);&quot;null&quot;;&quot;&quot;&quot;&quot;&amp;[.$W231]&amp;&quot;&quot;&quot;&quot;);[$JSON.$G$1];[.$Y231];[$JSON.$H$1];[.$H231];[$JSON.$I$1];[.J231];[$JSON.$J$1];[.$L231];[$JSON.$K$1];[.$O231];[$JSON.$L$1];[.$N231];[$JSON.$M$1];[.$R231];[$JSON.$N$1];[.$T231];[$JSON.$O$1];IF(ISNA([.$V231]);&quot;null&quot;;[.$V231]);[$JSON.$P$1];[.$X231];[$JSON.$Q$1];[.$A231];[$JSON.$R$1];[.$B231];[$JSON.$S$1])" office:value-type="string" office:string-value="{&quot;id&quot;:&quot;3-2&quot;,&quot;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orderTable&quot;:230,&quot;orderDeck&quot;:111}," calcext:value-type="string">
            <text:p>{"id":"3-2","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G232];[$収録番号.$A$1:$収録番号.$B$9];2;0)" office:value-type="float" office:value="35" calcext:value-type="float">
            <text:p>35</text:p>
          </table:table-cell>
          <table:table-cell office:value-type="string" calcext:value-type="string">
            <text:p>SR</text:p>
          </table:table-cell>
          <table:table-cell table:formula="of:=VLOOKUP([.I232];[$レアリティ番号.$A$1:$レアリティ番号.$B$4];2;0)" office:value-type="float" office:value="4" calcext:value-type="float">
            <text:p>4</text:p>
          </table:table-cell>
          <table:table-cell office:value-type="string" calcext:value-type="string">
            <text:p>イジン</text:p>
          </table:table-cell>
          <table:table-cell table:formula="of:=VLOOKUP([.K232];[$種類番号.$A$1:$種類番号.$B$4];2;0)" office:value-type="float" office:value="1" calcext:value-type="float">
            <text:p>1</text:p>
          </table:table-cell>
          <table:table-cell office:value-type="string" calcext:value-type="string">
            <text:p>青</text:p>
          </table:table-cell>
          <table:table-cell table:formula="of:=VLOOKUP([.M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office:value-type="float" office:value="5000" calcext:value-type="float">
            <text:p>5000</text:p>
          </table:table-cell>
          <table:table-cell table:style-name="ce8" office:value-type="string" calcext:value-type="string">
            <text:p>1ドローする</text:p>
          </table:table-cell>
          <table:table-cell table:formula="of:=IFERROR(VLOOKUP([.$W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IF(ISNA([.$S232]);&quot;null&quot;;&quot;&quot;&quot;&quot;&amp;[.$S232]&amp;&quot;&quot;&quot;&quot;);[$JSON.$E$1];[.$U232];[$JSON.$F$1];IF(ISNA([.$W232]);&quot;null&quot;;&quot;&quot;&quot;&quot;&amp;[.$W232]&amp;&quot;&quot;&quot;&quot;);[$JSON.$G$1];[.$Y232];[$JSON.$H$1];[.$H232];[$JSON.$I$1];[.J232];[$JSON.$J$1];[.$L232];[$JSON.$K$1];[.$O232];[$JSON.$L$1];[.$N232];[$JSON.$M$1];[.$R232];[$JSON.$N$1];[.$T232];[$JSON.$O$1];IF(ISNA([.$V232]);&quot;null&quot;;[.$V232]);[$JSON.$P$1];[.$X232];[$JSON.$Q$1];[.$A232];[$JSON.$R$1];[.$B232];[$JSON.$S$1])" office:value-type="string" office:string-value="{&quot;id&quot;:&quot;3-3&quot;,&quot;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orderTable&quot;:231,&quot;orderDeck&quot;:206}," calcext:value-type="string">
            <text:p>{"id":"3-3","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G233];[$収録番号.$A$1:$収録番号.$B$9];2;0)" office:value-type="float" office:value="35" calcext:value-type="float">
            <text:p>35</text:p>
          </table:table-cell>
          <table:table-cell office:value-type="string" calcext:value-type="string">
            <text:p>SR</text:p>
          </table:table-cell>
          <table:table-cell table:formula="of:=VLOOKUP([.I233];[$レアリティ番号.$A$1:$レアリティ番号.$B$4];2;0)" office:value-type="float" office:value="4" calcext:value-type="float">
            <text:p>4</text:p>
          </table:table-cell>
          <table:table-cell office:value-type="string" calcext:value-type="string">
            <text:p>イジン</text:p>
          </table:table-cell>
          <table:table-cell table:formula="of:=VLOOKUP([.K233];[$種類番号.$A$1:$種類番号.$B$4];2;0)" office:value-type="float" office:value="1" calcext:value-type="float">
            <text:p>1</text:p>
          </table:table-cell>
          <table:table-cell office:value-type="string" calcext:value-type="string">
            <text:p>青</text:p>
          </table:table-cell>
          <table:table-cell table:formula="of:=VLOOKUP([.M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3];[$能力語番号.$A$1:$能力語番号.$B$10];2;0);0)" office:value-type="float" office:value="0" calcext:value-type="float">
            <text:p>0</text:p>
          </table:table-cell>
          <table:table-cell office:value-type="string" calcext:value-type="string">
            <text:p>思想</text:p>
          </table:table-cell>
          <table:table-cell table:formula="of:=IFERROR(VLOOKUP([.$S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IF(ISNA([.$S233]);&quot;null&quot;;&quot;&quot;&quot;&quot;&amp;[.$S233]&amp;&quot;&quot;&quot;&quot;);[$JSON.$E$1];[.$U233];[$JSON.$F$1];IF(ISNA([.$W233]);&quot;null&quot;;&quot;&quot;&quot;&quot;&amp;[.$W233]&amp;&quot;&quot;&quot;&quot;);[$JSON.$G$1];[.$Y233];[$JSON.$H$1];[.$H233];[$JSON.$I$1];[.J233];[$JSON.$J$1];[.$L233];[$JSON.$K$1];[.$O233];[$JSON.$L$1];[.$N233];[$JSON.$M$1];[.$R233];[$JSON.$N$1];[.$T233];[$JSON.$O$1];IF(ISNA([.$V233]);&quot;null&quot;;[.$V233]);[$JSON.$P$1];[.$X233];[$JSON.$Q$1];[.$A233];[$JSON.$R$1];[.$B233];[$JSON.$S$1])" office:value-type="string" office:string-value="{&quot;id&quot;:&quot;3-4&quot;,&quot;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orderTable&quot;:232,&quot;orderDeck&quot;:160}," calcext:value-type="string">
            <text:p>{"id":"3-4","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G234];[$収録番号.$A$1:$収録番号.$B$9];2;0)" office:value-type="float" office:value="35" calcext:value-type="float">
            <text:p>35</text:p>
          </table:table-cell>
          <table:table-cell office:value-type="string" calcext:value-type="string">
            <text:p>SR</text:p>
          </table:table-cell>
          <table:table-cell table:formula="of:=VLOOKUP([.I234];[$レアリティ番号.$A$1:$レアリティ番号.$B$4];2;0)" office:value-type="float" office:value="4" calcext:value-type="float">
            <text:p>4</text:p>
          </table:table-cell>
          <table:table-cell office:value-type="string" calcext:value-type="string">
            <text:p>イジン</text:p>
          </table:table-cell>
          <table:table-cell table:formula="of:=VLOOKUP([.K234];[$種類番号.$A$1:$種類番号.$B$4];2;0)" office:value-type="float" office:value="1" calcext:value-type="float">
            <text:p>1</text:p>
          </table:table-cell>
          <table:table-cell office:value-type="string" calcext:value-type="string">
            <text:p>緑</text:p>
          </table:table-cell>
          <table:table-cell table:formula="of:=VLOOKUP([.M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office:value-type="float" office:value="4000" calcext:value-type="float">
            <text:p>4000</text:p>
          </table:table-cell>
          <table:table-cell table:style-name="ce8" office:value-type="string" calcext:value-type="string">
            <text:p>木霊</text:p>
          </table:table-cell>
          <table:table-cell table:formula="of:=IFERROR(VLOOKUP([.$W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IF(ISNA([.$S234]);&quot;null&quot;;&quot;&quot;&quot;&quot;&amp;[.$S234]&amp;&quot;&quot;&quot;&quot;);[$JSON.$E$1];[.$U234];[$JSON.$F$1];IF(ISNA([.$W234]);&quot;null&quot;;&quot;&quot;&quot;&quot;&amp;[.$W234]&amp;&quot;&quot;&quot;&quot;);[$JSON.$G$1];[.$Y234];[$JSON.$H$1];[.$H234];[$JSON.$I$1];[.J234];[$JSON.$J$1];[.$L234];[$JSON.$K$1];[.$O234];[$JSON.$L$1];[.$N234];[$JSON.$M$1];[.$R234];[$JSON.$N$1];[.$T234];[$JSON.$O$1];IF(ISNA([.$V234]);&quot;null&quot;;[.$V234]);[$JSON.$P$1];[.$X234];[$JSON.$Q$1];[.$A234];[$JSON.$R$1];[.$B234];[$JSON.$S$1])" office:value-type="string" office:string-value="{&quot;id&quot;:&quot;3-5&quot;,&quot;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orderTable&quot;:233,&quot;orderDeck&quot;:169}," calcext:value-type="string">
            <text:p>{"id":"3-5","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G235];[$収録番号.$A$1:$収録番号.$B$9];2;0)" office:value-type="float" office:value="35" calcext:value-type="float">
            <text:p>35</text:p>
          </table:table-cell>
          <table:table-cell office:value-type="string" calcext:value-type="string">
            <text:p>SR</text:p>
          </table:table-cell>
          <table:table-cell table:formula="of:=VLOOKUP([.I235];[$レアリティ番号.$A$1:$レアリティ番号.$B$4];2;0)" office:value-type="float" office:value="4" calcext:value-type="float">
            <text:p>4</text:p>
          </table:table-cell>
          <table:table-cell office:value-type="string" calcext:value-type="string">
            <text:p>イジン</text:p>
          </table:table-cell>
          <table:table-cell table:formula="of:=VLOOKUP([.K235];[$種類番号.$A$1:$種類番号.$B$4];2;0)" office:value-type="float" office:value="1" calcext:value-type="float">
            <text:p>1</text:p>
          </table:table-cell>
          <table:table-cell office:value-type="string" calcext:value-type="string">
            <text:p>緑</text:p>
          </table:table-cell>
          <table:table-cell table:formula="of:=VLOOKUP([.M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5];[$能力語番号.$A$1:$能力語番号.$B$10];2;0);0)" office:value-type="float" office:value="0" calcext:value-type="float">
            <text:p>0</text:p>
          </table:table-cell>
          <table:table-cell office:value-type="string" calcext:value-type="string">
            <text:p>美術</text:p>
          </table:table-cell>
          <table:table-cell table:formula="of:=IFERROR(VLOOKUP([.$S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office:value-type="float" office:value="6000" calcext:value-type="float">
            <text:p>6000</text:p>
          </table:table-cell>
          <table:table-cell table:style-name="ce8" office:value-type="string" calcext:value-type="string">
            <text:p>魔力化</text:p>
          </table:table-cell>
          <table:table-cell table:formula="of:=IFERROR(VLOOKUP([.$W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IF(ISNA([.$S235]);&quot;null&quot;;&quot;&quot;&quot;&quot;&amp;[.$S235]&amp;&quot;&quot;&quot;&quot;);[$JSON.$E$1];[.$U235];[$JSON.$F$1];IF(ISNA([.$W235]);&quot;null&quot;;&quot;&quot;&quot;&quot;&amp;[.$W235]&amp;&quot;&quot;&quot;&quot;);[$JSON.$G$1];[.$Y235];[$JSON.$H$1];[.$H235];[$JSON.$I$1];[.J235];[$JSON.$J$1];[.$L235];[$JSON.$K$1];[.$O235];[$JSON.$L$1];[.$N235];[$JSON.$M$1];[.$R235];[$JSON.$N$1];[.$T235];[$JSON.$O$1];IF(ISNA([.$V235]);&quot;null&quot;;[.$V235]);[$JSON.$P$1];[.$X235];[$JSON.$Q$1];[.$A235];[$JSON.$R$1];[.$B235];[$JSON.$S$1])" office:value-type="string" office:string-value="{&quot;id&quot;:&quot;3-6&quot;,&quot;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orderTable&quot;:234,&quot;orderDeck&quot;:211}," calcext:value-type="string">
            <text:p>{"id":"3-6","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G236];[$収録番号.$A$1:$収録番号.$B$9];2;0)" office:value-type="float" office:value="35" calcext:value-type="float">
            <text:p>35</text:p>
          </table:table-cell>
          <table:table-cell office:value-type="string" calcext:value-type="string">
            <text:p>SR</text:p>
          </table:table-cell>
          <table:table-cell table:formula="of:=VLOOKUP([.I236];[$レアリティ番号.$A$1:$レアリティ番号.$B$4];2;0)" office:value-type="float" office:value="4" calcext:value-type="float">
            <text:p>4</text:p>
          </table:table-cell>
          <table:table-cell office:value-type="string" calcext:value-type="string">
            <text:p>イジン</text:p>
          </table:table-cell>
          <table:table-cell table:formula="of:=VLOOKUP([.K236];[$種類番号.$A$1:$種類番号.$B$4];2;0)" office:value-type="float" office:value="1" calcext:value-type="float">
            <text:p>1</text:p>
          </table:table-cell>
          <table:table-cell office:value-type="string" calcext:value-type="string">
            <text:p>黄</text:p>
          </table:table-cell>
          <table:table-cell table:formula="of:=VLOOKUP([.M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IF(ISNA([.$S236]);&quot;null&quot;;&quot;&quot;&quot;&quot;&amp;[.$S236]&amp;&quot;&quot;&quot;&quot;);[$JSON.$E$1];[.$U236];[$JSON.$F$1];IF(ISNA([.$W236]);&quot;null&quot;;&quot;&quot;&quot;&quot;&amp;[.$W236]&amp;&quot;&quot;&quot;&quot;);[$JSON.$G$1];[.$Y236];[$JSON.$H$1];[.$H236];[$JSON.$I$1];[.J236];[$JSON.$J$1];[.$L236];[$JSON.$K$1];[.$O236];[$JSON.$L$1];[.$N236];[$JSON.$M$1];[.$R236];[$JSON.$N$1];[.$T236];[$JSON.$O$1];IF(ISNA([.$V236]);&quot;null&quot;;[.$V236]);[$JSON.$P$1];[.$X236];[$JSON.$Q$1];[.$A236];[$JSON.$R$1];[.$B236];[$JSON.$S$1])" office:value-type="string" office:string-value="{&quot;id&quot;:&quot;3-7&quot;,&quot;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orderTable&quot;:235,&quot;orderDeck&quot;:174}," calcext:value-type="string">
            <text:p>{"id":"3-7","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G237];[$収録番号.$A$1:$収録番号.$B$9];2;0)" office:value-type="float" office:value="35" calcext:value-type="float">
            <text:p>35</text:p>
          </table:table-cell>
          <table:table-cell office:value-type="string" calcext:value-type="string">
            <text:p>SR</text:p>
          </table:table-cell>
          <table:table-cell table:formula="of:=VLOOKUP([.I237];[$レアリティ番号.$A$1:$レアリティ番号.$B$4];2;0)" office:value-type="float" office:value="4" calcext:value-type="float">
            <text:p>4</text:p>
          </table:table-cell>
          <table:table-cell office:value-type="string" calcext:value-type="string">
            <text:p>イジン</text:p>
          </table:table-cell>
          <table:table-cell table:formula="of:=VLOOKUP([.K237];[$種類番号.$A$1:$種類番号.$B$4];2;0)" office:value-type="float" office:value="1" calcext:value-type="float">
            <text:p>1</text:p>
          </table:table-cell>
          <table:table-cell office:value-type="string" calcext:value-type="string">
            <text:p>黄</text:p>
          </table:table-cell>
          <table:table-cell table:formula="of:=VLOOKUP([.M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office:value-type="float" office:value="4000" calcext:value-type="float">
            <text:p>4000</text:p>
          </table:table-cell>
          <table:table-cell table:style-name="ce8" office:value-type="string" calcext:value-type="string">
            <text:p>魔力化</text:p>
          </table:table-cell>
          <table:table-cell table:formula="of:=IFERROR(VLOOKUP([.$W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IF(ISNA([.$S237]);&quot;null&quot;;&quot;&quot;&quot;&quot;&amp;[.$S237]&amp;&quot;&quot;&quot;&quot;);[$JSON.$E$1];[.$U237];[$JSON.$F$1];IF(ISNA([.$W237]);&quot;null&quot;;&quot;&quot;&quot;&quot;&amp;[.$W237]&amp;&quot;&quot;&quot;&quot;);[$JSON.$G$1];[.$Y237];[$JSON.$H$1];[.$H237];[$JSON.$I$1];[.J237];[$JSON.$J$1];[.$L237];[$JSON.$K$1];[.$O237];[$JSON.$L$1];[.$N237];[$JSON.$M$1];[.$R237];[$JSON.$N$1];[.$T237];[$JSON.$O$1];IF(ISNA([.$V237]);&quot;null&quot;;[.$V237]);[$JSON.$P$1];[.$X237];[$JSON.$Q$1];[.$A237];[$JSON.$R$1];[.$B237];[$JSON.$S$1])" office:value-type="string" office:string-value="{&quot;id&quot;:&quot;3-8&quot;,&quot;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orderTable&quot;:236,&quot;orderDeck&quot;:226}," calcext:value-type="string">
            <text:p>{"id":"3-8","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G238];[$収録番号.$A$1:$収録番号.$B$9];2;0)" office:value-type="float" office:value="35" calcext:value-type="float">
            <text:p>35</text:p>
          </table:table-cell>
          <table:table-cell office:value-type="string" calcext:value-type="string">
            <text:p>SR</text:p>
          </table:table-cell>
          <table:table-cell table:formula="of:=VLOOKUP([.I238];[$レアリティ番号.$A$1:$レアリティ番号.$B$4];2;0)" office:value-type="float" office:value="4" calcext:value-type="float">
            <text:p>4</text:p>
          </table:table-cell>
          <table:table-cell office:value-type="string" calcext:value-type="string">
            <text:p>イジン</text:p>
          </table:table-cell>
          <table:table-cell table:formula="of:=VLOOKUP([.K238];[$種類番号.$A$1:$種類番号.$B$4];2;0)" office:value-type="float" office:value="1" calcext:value-type="float">
            <text:p>1</text:p>
          </table:table-cell>
          <table:table-cell office:value-type="string" calcext:value-type="string">
            <text:p>紫</text:p>
          </table:table-cell>
          <table:table-cell table:formula="of:=VLOOKUP([.M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8];[$能力語番号.$A$1:$能力語番号.$B$10];2;0);0)" office:value-type="float" office:value="0" calcext:value-type="float">
            <text:p>0</text:p>
          </table:table-cell>
          <table:table-cell office:value-type="string" calcext:value-type="string">
            <text:p>志願</text:p>
          </table:table-cell>
          <table:table-cell table:formula="of:=IFERROR(VLOOKUP([.$S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office:value-type="float" office:value="5000" calcext:value-type="float">
            <text:p>5000</text:p>
          </table:table-cell>
          <table:table-cell table:style-name="ce8" office:value-type="string" calcext:value-type="string">
            <text:p>山札の上か下に戻す</text:p>
          </table:table-cell>
          <table:table-cell table:formula="of:=IFERROR(VLOOKUP([.$W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IF(ISNA([.$S238]);&quot;null&quot;;&quot;&quot;&quot;&quot;&amp;[.$S238]&amp;&quot;&quot;&quot;&quot;);[$JSON.$E$1];[.$U238];[$JSON.$F$1];IF(ISNA([.$W238]);&quot;null&quot;;&quot;&quot;&quot;&quot;&amp;[.$W238]&amp;&quot;&quot;&quot;&quot;);[$JSON.$G$1];[.$Y238];[$JSON.$H$1];[.$H238];[$JSON.$I$1];[.J238];[$JSON.$J$1];[.$L238];[$JSON.$K$1];[.$O238];[$JSON.$L$1];[.$N238];[$JSON.$M$1];[.$R238];[$JSON.$N$1];[.$T238];[$JSON.$O$1];IF(ISNA([.$V238]);&quot;null&quot;;[.$V238]);[$JSON.$P$1];[.$X238];[$JSON.$Q$1];[.$A238];[$JSON.$R$1];[.$B238];[$JSON.$S$1])" office:value-type="string" office:string-value="{&quot;id&quot;:&quot;3-9&quot;,&quot;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orderTable&quot;:237,&quot;orderDeck&quot;:200}," calcext:value-type="string">
            <text:p>{"id":"3-9","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G239];[$収録番号.$A$1:$収録番号.$B$9];2;0)" office:value-type="float" office:value="35" calcext:value-type="float">
            <text:p>35</text:p>
          </table:table-cell>
          <table:table-cell office:value-type="string" calcext:value-type="string">
            <text:p>SR</text:p>
          </table:table-cell>
          <table:table-cell table:formula="of:=VLOOKUP([.I239];[$レアリティ番号.$A$1:$レアリティ番号.$B$4];2;0)" office:value-type="float" office:value="4" calcext:value-type="float">
            <text:p>4</text:p>
          </table:table-cell>
          <table:table-cell office:value-type="string" calcext:value-type="string">
            <text:p>イジン</text:p>
          </table:table-cell>
          <table:table-cell table:formula="of:=VLOOKUP([.K239];[$種類番号.$A$1:$種類番号.$B$4];2;0)" office:value-type="float" office:value="1" calcext:value-type="float">
            <text:p>1</text:p>
          </table:table-cell>
          <table:table-cell office:value-type="string" calcext:value-type="string">
            <text:p>紫</text:p>
          </table:table-cell>
          <table:table-cell table:formula="of:=VLOOKUP([.M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office:value-type="float" office:value="1500" calcext:value-type="float">
            <text:p>1500</text:p>
          </table:table-cell>
          <table:table-cell table:style-name="ce8" office:value-type="string" calcext:value-type="string">
            <text:p>1ドローする</text:p>
          </table:table-cell>
          <table:table-cell table:formula="of:=IFERROR(VLOOKUP([.$W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IF(ISNA([.$S239]);&quot;null&quot;;&quot;&quot;&quot;&quot;&amp;[.$S239]&amp;&quot;&quot;&quot;&quot;);[$JSON.$E$1];[.$U239];[$JSON.$F$1];IF(ISNA([.$W239]);&quot;null&quot;;&quot;&quot;&quot;&quot;&amp;[.$W239]&amp;&quot;&quot;&quot;&quot;);[$JSON.$G$1];[.$Y239];[$JSON.$H$1];[.$H239];[$JSON.$I$1];[.J239];[$JSON.$J$1];[.$L239];[$JSON.$K$1];[.$O239];[$JSON.$L$1];[.$N239];[$JSON.$M$1];[.$R239];[$JSON.$N$1];[.$T239];[$JSON.$O$1];IF(ISNA([.$V239]);&quot;null&quot;;[.$V239]);[$JSON.$P$1];[.$X239];[$JSON.$Q$1];[.$A239];[$JSON.$R$1];[.$B239];[$JSON.$S$1])" office:value-type="string" office:string-value="{&quot;id&quot;:&quot;3-10&quot;,&quot;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orderTable&quot;:238,&quot;orderDeck&quot;:60}," calcext:value-type="string">
            <text:p>{"id":"3-10","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G240];[$収録番号.$A$1:$収録番号.$B$9];2;0)" office:value-type="float" office:value="35" calcext:value-type="float">
            <text:p>35</text:p>
          </table:table-cell>
          <table:table-cell office:value-type="string" calcext:value-type="string">
            <text:p>N</text:p>
          </table:table-cell>
          <table:table-cell table:formula="of:=VLOOKUP([.I240];[$レアリティ番号.$A$1:$レアリティ番号.$B$4];2;0)" office:value-type="float" office:value="1" calcext:value-type="float">
            <text:p>1</text:p>
          </table:table-cell>
          <table:table-cell office:value-type="string" calcext:value-type="string">
            <text:p>イジン</text:p>
          </table:table-cell>
          <table:table-cell table:formula="of:=VLOOKUP([.K240];[$種類番号.$A$1:$種類番号.$B$4];2;0)" office:value-type="float" office:value="1" calcext:value-type="float">
            <text:p>1</text:p>
          </table:table-cell>
          <table:table-cell office:value-type="string" calcext:value-type="string">
            <text:p>赤</text:p>
          </table:table-cell>
          <table:table-cell table:formula="of:=VLOOKUP([.M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0];[$特性番号.$A$1:$特性番号.$B$8];2;0);0)" office:value-type="float" office:value="0" calcext:value-type="float">
            <text:p>0</text:p>
          </table:table-cell>
          <table:table-cell office:value-type="string" calcext:value-type="string">
            <text:p>スタンド¶戦場に置かれたとき、1ドロー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IF(ISNA([.$S240]);&quot;null&quot;;&quot;&quot;&quot;&quot;&amp;[.$S240]&amp;&quot;&quot;&quot;&quot;);[$JSON.$E$1];[.$U240];[$JSON.$F$1];IF(ISNA([.$W240]);&quot;null&quot;;&quot;&quot;&quot;&quot;&amp;[.$W240]&amp;&quot;&quot;&quot;&quot;);[$JSON.$G$1];[.$Y240];[$JSON.$H$1];[.$H240];[$JSON.$I$1];[.J240];[$JSON.$J$1];[.$L240];[$JSON.$K$1];[.$O240];[$JSON.$L$1];[.$N240];[$JSON.$M$1];[.$R240];[$JSON.$N$1];[.$T240];[$JSON.$O$1];IF(ISNA([.$V240]);&quot;null&quot;;[.$V240]);[$JSON.$P$1];[.$X240];[$JSON.$Q$1];[.$A240];[$JSON.$R$1];[.$B240];[$JSON.$S$1])" office:value-type="string" office:string-value="{&quot;id&quot;:&quot;3-11&quot;,&quot;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orderTable&quot;:239,&quot;orderDeck&quot;:112}," calcext:value-type="string">
            <text:p>{"id":"3-11","name":"ウィリアム・セシル","kana":"うぃりあむせしる","traitText":null,"ruleText":"スタンド¶戦場に置かれたとき、1ドローする。","legacyText":"1ドローする","imageUrl":"https://one-draw.jp/ijinden/cardlist/003/card/03_011.png","expansion":35,"rarity":1,"type":1,"level":4,"color":1,"term":0,"trait":0,"power":100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G241];[$収録番号.$A$1:$収録番号.$B$9];2;0)" office:value-type="float" office:value="35" calcext:value-type="float">
            <text:p>35</text:p>
          </table:table-cell>
          <table:table-cell office:value-type="string" calcext:value-type="string">
            <text:p>N</text:p>
          </table:table-cell>
          <table:table-cell table:formula="of:=VLOOKUP([.I241];[$レアリティ番号.$A$1:$レアリティ番号.$B$4];2;0)" office:value-type="float" office:value="1" calcext:value-type="float">
            <text:p>1</text:p>
          </table:table-cell>
          <table:table-cell office:value-type="string" calcext:value-type="string">
            <text:p>イジン</text:p>
          </table:table-cell>
          <table:table-cell table:formula="of:=VLOOKUP([.K241];[$種類番号.$A$1:$種類番号.$B$4];2;0)" office:value-type="float" office:value="1" calcext:value-type="float">
            <text:p>1</text:p>
          </table:table-cell>
          <table:table-cell office:value-type="string" calcext:value-type="string">
            <text:p>赤</text:p>
          </table:table-cell>
          <table:table-cell table:formula="of:=VLOOKUP([.M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IF(ISNA([.$S241]);&quot;null&quot;;&quot;&quot;&quot;&quot;&amp;[.$S241]&amp;&quot;&quot;&quot;&quot;);[$JSON.$E$1];[.$U241];[$JSON.$F$1];IF(ISNA([.$W241]);&quot;null&quot;;&quot;&quot;&quot;&quot;&amp;[.$W241]&amp;&quot;&quot;&quot;&quot;);[$JSON.$G$1];[.$Y241];[$JSON.$H$1];[.$H241];[$JSON.$I$1];[.J241];[$JSON.$J$1];[.$L241];[$JSON.$K$1];[.$O241];[$JSON.$L$1];[.$N241];[$JSON.$M$1];[.$R241];[$JSON.$N$1];[.$T241];[$JSON.$O$1];IF(ISNA([.$V241]);&quot;null&quot;;[.$V241]);[$JSON.$P$1];[.$X241];[$JSON.$Q$1];[.$A241];[$JSON.$R$1];[.$B241];[$JSON.$S$1])" office:value-type="string" office:string-value="{&quot;id&quot;:&quot;3-12&quot;,&quot;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orderTable&quot;:240,&quot;orderDeck&quot;:71}," calcext:value-type="string">
            <text:p>{"id":"3-12","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G242];[$収録番号.$A$1:$収録番号.$B$9];2;0)" office:value-type="float" office:value="35" calcext:value-type="float">
            <text:p>35</text:p>
          </table:table-cell>
          <table:table-cell office:value-type="string" calcext:value-type="string">
            <text:p>N</text:p>
          </table:table-cell>
          <table:table-cell table:formula="of:=VLOOKUP([.I242];[$レアリティ番号.$A$1:$レアリティ番号.$B$4];2;0)" office:value-type="float" office:value="1" calcext:value-type="float">
            <text:p>1</text:p>
          </table:table-cell>
          <table:table-cell office:value-type="string" calcext:value-type="string">
            <text:p>イジン</text:p>
          </table:table-cell>
          <table:table-cell table:formula="of:=VLOOKUP([.K242];[$種類番号.$A$1:$種類番号.$B$4];2;0)" office:value-type="float" office:value="1" calcext:value-type="float">
            <text:p>1</text:p>
          </table:table-cell>
          <table:table-cell office:value-type="string" calcext:value-type="string">
            <text:p>赤</text:p>
          </table:table-cell>
          <table:table-cell table:formula="of:=VLOOKUP([.M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IF(ISNA([.$S242]);&quot;null&quot;;&quot;&quot;&quot;&quot;&amp;[.$S242]&amp;&quot;&quot;&quot;&quot;);[$JSON.$E$1];[.$U242];[$JSON.$F$1];IF(ISNA([.$W242]);&quot;null&quot;;&quot;&quot;&quot;&quot;&amp;[.$W242]&amp;&quot;&quot;&quot;&quot;);[$JSON.$G$1];[.$Y242];[$JSON.$H$1];[.$H242];[$JSON.$I$1];[.J242];[$JSON.$J$1];[.$L242];[$JSON.$K$1];[.$O242];[$JSON.$L$1];[.$N242];[$JSON.$M$1];[.$R242];[$JSON.$N$1];[.$T242];[$JSON.$O$1];IF(ISNA([.$V242]);&quot;null&quot;;[.$V242]);[$JSON.$P$1];[.$X242];[$JSON.$Q$1];[.$A242];[$JSON.$R$1];[.$B242];[$JSON.$S$1])" office:value-type="string" office:string-value="{&quot;id&quot;:&quot;3-13&quot;,&quot;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orderTable&quot;:241,&quot;orderDeck&quot;:29}," calcext:value-type="string">
            <text:p>{"id":"3-13","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G243];[$収録番号.$A$1:$収録番号.$B$9];2;0)" office:value-type="float" office:value="35" calcext:value-type="float">
            <text:p>35</text:p>
          </table:table-cell>
          <table:table-cell office:value-type="string" calcext:value-type="string">
            <text:p>N</text:p>
          </table:table-cell>
          <table:table-cell table:formula="of:=VLOOKUP([.I243];[$レアリティ番号.$A$1:$レアリティ番号.$B$4];2;0)" office:value-type="float" office:value="1" calcext:value-type="float">
            <text:p>1</text:p>
          </table:table-cell>
          <table:table-cell office:value-type="string" calcext:value-type="string">
            <text:p>イジン</text:p>
          </table:table-cell>
          <table:table-cell table:formula="of:=VLOOKUP([.K243];[$種類番号.$A$1:$種類番号.$B$4];2;0)" office:value-type="float" office:value="1" calcext:value-type="float">
            <text:p>1</text:p>
          </table:table-cell>
          <table:table-cell office:value-type="string" calcext:value-type="string">
            <text:p>赤</text:p>
          </table:table-cell>
          <table:table-cell table:formula="of:=VLOOKUP([.M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IF(ISNA([.$S243]);&quot;null&quot;;&quot;&quot;&quot;&quot;&amp;[.$S243]&amp;&quot;&quot;&quot;&quot;);[$JSON.$E$1];[.$U243];[$JSON.$F$1];IF(ISNA([.$W243]);&quot;null&quot;;&quot;&quot;&quot;&quot;&amp;[.$W243]&amp;&quot;&quot;&quot;&quot;);[$JSON.$G$1];[.$Y243];[$JSON.$H$1];[.$H243];[$JSON.$I$1];[.J243];[$JSON.$J$1];[.$L243];[$JSON.$K$1];[.$O243];[$JSON.$L$1];[.$N243];[$JSON.$M$1];[.$R243];[$JSON.$N$1];[.$T243];[$JSON.$O$1];IF(ISNA([.$V243]);&quot;null&quot;;[.$V243]);[$JSON.$P$1];[.$X243];[$JSON.$Q$1];[.$A243];[$JSON.$R$1];[.$B243];[$JSON.$S$1])" office:value-type="string" office:string-value="{&quot;id&quot;:&quot;3-14&quot;,&quot;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orderTable&quot;:242,&quot;orderDeck&quot;:72}," calcext:value-type="string">
            <text:p>{"id":"3-14","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G244];[$収録番号.$A$1:$収録番号.$B$9];2;0)" office:value-type="float" office:value="35" calcext:value-type="float">
            <text:p>35</text:p>
          </table:table-cell>
          <table:table-cell office:value-type="string" calcext:value-type="string">
            <text:p>R</text:p>
          </table:table-cell>
          <table:table-cell table:formula="of:=VLOOKUP([.I244];[$レアリティ番号.$A$1:$レアリティ番号.$B$4];2;0)" office:value-type="float" office:value="2" calcext:value-type="float">
            <text:p>2</text:p>
          </table:table-cell>
          <table:table-cell office:value-type="string" calcext:value-type="string">
            <text:p>イジン</text:p>
          </table:table-cell>
          <table:table-cell table:formula="of:=VLOOKUP([.K244];[$種類番号.$A$1:$種類番号.$B$4];2;0)" office:value-type="float" office:value="1" calcext:value-type="float">
            <text:p>1</text:p>
          </table:table-cell>
          <table:table-cell office:value-type="string" calcext:value-type="string">
            <text:p>赤</text:p>
          </table:table-cell>
          <table:table-cell table:formula="of:=VLOOKUP([.M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office:value-type="float" office:value="4000" calcext:value-type="float">
            <text:p>4000</text:p>
          </table:table-cell>
          <table:table-cell table:style-name="ce8" office:value-type="string" calcext:value-type="string">
            <text:p>1ドローする</text:p>
          </table:table-cell>
          <table:table-cell table:formula="of:=IFERROR(VLOOKUP([.$W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IF(ISNA([.$S244]);&quot;null&quot;;&quot;&quot;&quot;&quot;&amp;[.$S244]&amp;&quot;&quot;&quot;&quot;);[$JSON.$E$1];[.$U244];[$JSON.$F$1];IF(ISNA([.$W244]);&quot;null&quot;;&quot;&quot;&quot;&quot;&amp;[.$W244]&amp;&quot;&quot;&quot;&quot;);[$JSON.$G$1];[.$Y244];[$JSON.$H$1];[.$H244];[$JSON.$I$1];[.J244];[$JSON.$J$1];[.$L244];[$JSON.$K$1];[.$O244];[$JSON.$L$1];[.$N244];[$JSON.$M$1];[.$R244];[$JSON.$N$1];[.$T244];[$JSON.$O$1];IF(ISNA([.$V244]);&quot;null&quot;;[.$V244]);[$JSON.$P$1];[.$X244];[$JSON.$Q$1];[.$A244];[$JSON.$R$1];[.$B244];[$JSON.$S$1])" office:value-type="string" office:string-value="{&quot;id&quot;:&quot;3-15&quot;,&quot;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orderTable&quot;:243,&quot;orderDeck&quot;:151}," calcext:value-type="string">
            <text:p>{"id":"3-15","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G245];[$収録番号.$A$1:$収録番号.$B$9];2;0)" office:value-type="float" office:value="35" calcext:value-type="float">
            <text:p>35</text:p>
          </table:table-cell>
          <table:table-cell office:value-type="string" calcext:value-type="string">
            <text:p>R</text:p>
          </table:table-cell>
          <table:table-cell table:formula="of:=VLOOKUP([.I245];[$レアリティ番号.$A$1:$レアリティ番号.$B$4];2;0)" office:value-type="float" office:value="2" calcext:value-type="float">
            <text:p>2</text:p>
          </table:table-cell>
          <table:table-cell office:value-type="string" calcext:value-type="string">
            <text:p>イジン</text:p>
          </table:table-cell>
          <table:table-cell table:formula="of:=VLOOKUP([.K245];[$種類番号.$A$1:$種類番号.$B$4];2;0)" office:value-type="float" office:value="1" calcext:value-type="float">
            <text:p>1</text:p>
          </table:table-cell>
          <table:table-cell office:value-type="string" calcext:value-type="string">
            <text:p>赤</text:p>
          </table:table-cell>
          <table:table-cell table:formula="of:=VLOOKUP([.M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office:value-type="float" office:value="500" calcext:value-type="float">
            <text:p>500</text:p>
          </table:table-cell>
          <table:table-cell table:style-name="ce8" table:formula="of:=NA()" office:value-type="string" office:string-value="" calcext:value-type="error">
            <text:p>#N/A</text:p>
          </table:table-cell>
          <table:table-cell table:formula="of:=IFERROR(VLOOKUP([.$W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IF(ISNA([.$S245]);&quot;null&quot;;&quot;&quot;&quot;&quot;&amp;[.$S245]&amp;&quot;&quot;&quot;&quot;);[$JSON.$E$1];[.$U245];[$JSON.$F$1];IF(ISNA([.$W245]);&quot;null&quot;;&quot;&quot;&quot;&quot;&amp;[.$W245]&amp;&quot;&quot;&quot;&quot;);[$JSON.$G$1];[.$Y245];[$JSON.$H$1];[.$H245];[$JSON.$I$1];[.J245];[$JSON.$J$1];[.$L245];[$JSON.$K$1];[.$O245];[$JSON.$L$1];[.$N245];[$JSON.$M$1];[.$R245];[$JSON.$N$1];[.$T245];[$JSON.$O$1];IF(ISNA([.$V245]);&quot;null&quot;;[.$V245]);[$JSON.$P$1];[.$X245];[$JSON.$Q$1];[.$A245];[$JSON.$R$1];[.$B245];[$JSON.$S$1])" office:value-type="string" office:string-value="{&quot;id&quot;:&quot;3-16&quot;,&quot;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orderTable&quot;:244,&quot;orderDeck&quot;:5}," calcext:value-type="string">
            <text:p>{"id":"3-16","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G246];[$収録番号.$A$1:$収録番号.$B$9];2;0)" office:value-type="float" office:value="35" calcext:value-type="float">
            <text:p>35</text:p>
          </table:table-cell>
          <table:table-cell office:value-type="string" calcext:value-type="string">
            <text:p>N</text:p>
          </table:table-cell>
          <table:table-cell table:formula="of:=VLOOKUP([.I246];[$レアリティ番号.$A$1:$レアリティ番号.$B$4];2;0)" office:value-type="float" office:value="1" calcext:value-type="float">
            <text:p>1</text:p>
          </table:table-cell>
          <table:table-cell office:value-type="string" calcext:value-type="string">
            <text:p>イジン</text:p>
          </table:table-cell>
          <table:table-cell table:formula="of:=VLOOKUP([.K246];[$種類番号.$A$1:$種類番号.$B$4];2;0)" office:value-type="float" office:value="1" calcext:value-type="float">
            <text:p>1</text:p>
          </table:table-cell>
          <table:table-cell office:value-type="string" calcext:value-type="string">
            <text:p>赤</text:p>
          </table:table-cell>
          <table:table-cell table:formula="of:=VLOOKUP([.M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Q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S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office:value-type="float" office:value="8000" calcext:value-type="float">
            <text:p>8000</text:p>
          </table:table-cell>
          <table:table-cell table:style-name="ce8" office:value-type="string" calcext:value-type="string">
            <text:p>1ドローする</text:p>
          </table:table-cell>
          <table:table-cell table:formula="of:=IFERROR(VLOOKUP([.$W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IF(ISNA([.$S246]);&quot;null&quot;;&quot;&quot;&quot;&quot;&amp;[.$S246]&amp;&quot;&quot;&quot;&quot;);[$JSON.$E$1];[.$U246];[$JSON.$F$1];IF(ISNA([.$W246]);&quot;null&quot;;&quot;&quot;&quot;&quot;&amp;[.$W246]&amp;&quot;&quot;&quot;&quot;);[$JSON.$G$1];[.$Y246];[$JSON.$H$1];[.$H246];[$JSON.$I$1];[.J246];[$JSON.$J$1];[.$L246];[$JSON.$K$1];[.$O246];[$JSON.$L$1];[.$N246];[$JSON.$M$1];[.$R246];[$JSON.$N$1];[.$T246];[$JSON.$O$1];IF(ISNA([.$V246]);&quot;null&quot;;[.$V246]);[$JSON.$P$1];[.$X246];[$JSON.$Q$1];[.$A246];[$JSON.$R$1];[.$B246];[$JSON.$S$1])" office:value-type="string" office:string-value="{&quot;id&quot;:&quot;3-17&quot;,&quot;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orderTable&quot;:245,&quot;orderDeck&quot;:219}," calcext:value-type="string">
            <text:p>{"id":"3-17","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G247];[$収録番号.$A$1:$収録番号.$B$9];2;0)" office:value-type="float" office:value="35" calcext:value-type="float">
            <text:p>35</text:p>
          </table:table-cell>
          <table:table-cell office:value-type="string" calcext:value-type="string">
            <text:p>N</text:p>
          </table:table-cell>
          <table:table-cell table:formula="of:=VLOOKUP([.I247];[$レアリティ番号.$A$1:$レアリティ番号.$B$4];2;0)" office:value-type="float" office:value="1" calcext:value-type="float">
            <text:p>1</text:p>
          </table:table-cell>
          <table:table-cell office:value-type="string" calcext:value-type="string">
            <text:p>イジン</text:p>
          </table:table-cell>
          <table:table-cell table:formula="of:=VLOOKUP([.K247];[$種類番号.$A$1:$種類番号.$B$4];2;0)" office:value-type="float" office:value="1" calcext:value-type="float">
            <text:p>1</text:p>
          </table:table-cell>
          <table:table-cell office:value-type="string" calcext:value-type="string">
            <text:p>赤</text:p>
          </table:table-cell>
          <table:table-cell table:formula="of:=VLOOKUP([.M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IF(ISNA([.$S247]);&quot;null&quot;;&quot;&quot;&quot;&quot;&amp;[.$S247]&amp;&quot;&quot;&quot;&quot;);[$JSON.$E$1];[.$U247];[$JSON.$F$1];IF(ISNA([.$W247]);&quot;null&quot;;&quot;&quot;&quot;&quot;&amp;[.$W247]&amp;&quot;&quot;&quot;&quot;);[$JSON.$G$1];[.$Y247];[$JSON.$H$1];[.$H247];[$JSON.$I$1];[.J247];[$JSON.$J$1];[.$L247];[$JSON.$K$1];[.$O247];[$JSON.$L$1];[.$N247];[$JSON.$M$1];[.$R247];[$JSON.$N$1];[.$T247];[$JSON.$O$1];IF(ISNA([.$V247]);&quot;null&quot;;[.$V247]);[$JSON.$P$1];[.$X247];[$JSON.$Q$1];[.$A247];[$JSON.$R$1];[.$B247];[$JSON.$S$1])" office:value-type="string" office:string-value="{&quot;id&quot;:&quot;3-18&quot;,&quot;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orderTable&quot;:246,&quot;orderDeck&quot;:183}," calcext:value-type="string">
            <text:p>{"id":"3-18","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G248];[$収録番号.$A$1:$収録番号.$B$9];2;0)" office:value-type="float" office:value="35" calcext:value-type="float">
            <text:p>35</text:p>
          </table:table-cell>
          <table:table-cell office:value-type="string" calcext:value-type="string">
            <text:p>R</text:p>
          </table:table-cell>
          <table:table-cell table:formula="of:=VLOOKUP([.I248];[$レアリティ番号.$A$1:$レアリティ番号.$B$4];2;0)" office:value-type="float" office:value="2" calcext:value-type="float">
            <text:p>2</text:p>
          </table:table-cell>
          <table:table-cell office:value-type="string" calcext:value-type="string">
            <text:p>イジン</text:p>
          </table:table-cell>
          <table:table-cell table:formula="of:=VLOOKUP([.K248];[$種類番号.$A$1:$種類番号.$B$4];2;0)" office:value-type="float" office:value="1" calcext:value-type="float">
            <text:p>1</text:p>
          </table:table-cell>
          <table:table-cell office:value-type="string" calcext:value-type="string">
            <text:p>青</text:p>
          </table:table-cell>
          <table:table-cell table:formula="of:=VLOOKUP([.M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48];[$能力語番号.$A$1:$能力語番号.$B$10];2;0);0)" office:value-type="float" office:value="0" calcext:value-type="float">
            <text:p>0</text:p>
          </table:table-cell>
          <table:table-cell office:value-type="string" calcext:value-type="string">
            <text:p>剣術</text:p>
          </table:table-cell>
          <table:table-cell table:formula="of:=IFERROR(VLOOKUP([.$S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office:value-type="float" office:value="8000" calcext:value-type="float">
            <text:p>8000</text:p>
          </table:table-cell>
          <table:table-cell table:style-name="ce8" office:value-type="string" calcext:value-type="string">
            <text:p>反魂</text:p>
          </table:table-cell>
          <table:table-cell table:formula="of:=IFERROR(VLOOKUP([.$W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IF(ISNA([.$S248]);&quot;null&quot;;&quot;&quot;&quot;&quot;&amp;[.$S248]&amp;&quot;&quot;&quot;&quot;);[$JSON.$E$1];[.$U248];[$JSON.$F$1];IF(ISNA([.$W248]);&quot;null&quot;;&quot;&quot;&quot;&quot;&amp;[.$W248]&amp;&quot;&quot;&quot;&quot;);[$JSON.$G$1];[.$Y248];[$JSON.$H$1];[.$H248];[$JSON.$I$1];[.J248];[$JSON.$J$1];[.$L248];[$JSON.$K$1];[.$O248];[$JSON.$L$1];[.$N248];[$JSON.$M$1];[.$R248];[$JSON.$N$1];[.$T248];[$JSON.$O$1];IF(ISNA([.$V248]);&quot;null&quot;;[.$V248]);[$JSON.$P$1];[.$X248];[$JSON.$Q$1];[.$A248];[$JSON.$R$1];[.$B248];[$JSON.$S$1])" office:value-type="string" office:string-value="{&quot;id&quot;:&quot;3-19&quot;,&quot;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orderTable&quot;:247,&quot;orderDeck&quot;:220}," calcext:value-type="string">
            <text:p>{"id":"3-19","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G249];[$収録番号.$A$1:$収録番号.$B$9];2;0)" office:value-type="float" office:value="35" calcext:value-type="float">
            <text:p>35</text:p>
          </table:table-cell>
          <table:table-cell office:value-type="string" calcext:value-type="string">
            <text:p>N</text:p>
          </table:table-cell>
          <table:table-cell table:formula="of:=VLOOKUP([.I249];[$レアリティ番号.$A$1:$レアリティ番号.$B$4];2;0)" office:value-type="float" office:value="1" calcext:value-type="float">
            <text:p>1</text:p>
          </table:table-cell>
          <table:table-cell office:value-type="string" calcext:value-type="string">
            <text:p>イジン</text:p>
          </table:table-cell>
          <table:table-cell table:formula="of:=VLOOKUP([.K249];[$種類番号.$A$1:$種類番号.$B$4];2;0)" office:value-type="float" office:value="1" calcext:value-type="float">
            <text:p>1</text:p>
          </table:table-cell>
          <table:table-cell office:value-type="string" calcext:value-type="string">
            <text:p>青</text:p>
          </table:table-cell>
          <table:table-cell table:formula="of:=VLOOKUP([.M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IF(ISNA([.$S249]);&quot;null&quot;;&quot;&quot;&quot;&quot;&amp;[.$S249]&amp;&quot;&quot;&quot;&quot;);[$JSON.$E$1];[.$U249];[$JSON.$F$1];IF(ISNA([.$W249]);&quot;null&quot;;&quot;&quot;&quot;&quot;&amp;[.$W249]&amp;&quot;&quot;&quot;&quot;);[$JSON.$G$1];[.$Y249];[$JSON.$H$1];[.$H249];[$JSON.$I$1];[.J249];[$JSON.$J$1];[.$L249];[$JSON.$K$1];[.$O249];[$JSON.$L$1];[.$N249];[$JSON.$M$1];[.$R249];[$JSON.$N$1];[.$T249];[$JSON.$O$1];IF(ISNA([.$V249]);&quot;null&quot;;[.$V249]);[$JSON.$P$1];[.$X249];[$JSON.$Q$1];[.$A249];[$JSON.$R$1];[.$B249];[$JSON.$S$1])" office:value-type="string" office:string-value="{&quot;id&quot;:&quot;3-20&quot;,&quot;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orderTable&quot;:248,&quot;orderDeck&quot;:189}," calcext:value-type="string">
            <text:p>{"id":"3-20","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G250];[$収録番号.$A$1:$収録番号.$B$9];2;0)" office:value-type="float" office:value="35" calcext:value-type="float">
            <text:p>35</text:p>
          </table:table-cell>
          <table:table-cell office:value-type="string" calcext:value-type="string">
            <text:p>N</text:p>
          </table:table-cell>
          <table:table-cell table:formula="of:=VLOOKUP([.I250];[$レアリティ番号.$A$1:$レアリティ番号.$B$4];2;0)" office:value-type="float" office:value="1" calcext:value-type="float">
            <text:p>1</text:p>
          </table:table-cell>
          <table:table-cell office:value-type="string" calcext:value-type="string">
            <text:p>イジン</text:p>
          </table:table-cell>
          <table:table-cell table:formula="of:=VLOOKUP([.K250];[$種類番号.$A$1:$種類番号.$B$4];2;0)" office:value-type="float" office:value="1" calcext:value-type="float">
            <text:p>1</text:p>
          </table:table-cell>
          <table:table-cell office:value-type="string" calcext:value-type="string">
            <text:p>青</text:p>
          </table:table-cell>
          <table:table-cell table:formula="of:=VLOOKUP([.M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0];[$能力語番号.$A$1:$能力語番号.$B$10];2;0);0)" office:value-type="float" office:value="0" calcext:value-type="float">
            <text:p>0</text:p>
          </table:table-cell>
          <table:table-cell office:value-type="string" calcext:value-type="string">
            <text:p>思想</text:p>
          </table:table-cell>
          <table:table-cell table:formula="of:=IFERROR(VLOOKUP([.$S250];[$特性番号.$A$1:$特性番号.$B$8];2;0);0)" office:value-type="float" office:value="8" calcext:value-type="float">
            <text:p>8</text:p>
          </table:table-cell>
          <table:table-cell office:value-type="string" calcext:value-type="string">
            <text:p>スタンド</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IF(ISNA([.$S250]);&quot;null&quot;;&quot;&quot;&quot;&quot;&amp;[.$S250]&amp;&quot;&quot;&quot;&quot;);[$JSON.$E$1];[.$U250];[$JSON.$F$1];IF(ISNA([.$W250]);&quot;null&quot;;&quot;&quot;&quot;&quot;&amp;[.$W250]&amp;&quot;&quot;&quot;&quot;);[$JSON.$G$1];[.$Y250];[$JSON.$H$1];[.$H250];[$JSON.$I$1];[.J250];[$JSON.$J$1];[.$L250];[$JSON.$K$1];[.$O250];[$JSON.$L$1];[.$N250];[$JSON.$M$1];[.$R250];[$JSON.$N$1];[.$T250];[$JSON.$O$1];IF(ISNA([.$V250]);&quot;null&quot;;[.$V250]);[$JSON.$P$1];[.$X250];[$JSON.$Q$1];[.$A250];[$JSON.$R$1];[.$B250];[$JSON.$S$1])" office:value-type="string" office:string-value="{&quot;id&quot;:&quot;3-21&quot;,&quot;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orderTable&quot;:249,&quot;orderDeck&quot;:9}," calcext:value-type="string">
            <text:p>{"id":"3-21","name":"木戸孝允","kana":"きどたかよし","traitText":"思想","ruleText":"スタンド","legacyText":"1ドローする","imageUrl":"https://one-draw.jp/ijinden/cardlist/003/card/03_021.png","expansion":35,"rarity":1,"type":1,"level":1,"color":2,"term":0,"trait":8,"power":1000,"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G251];[$収録番号.$A$1:$収録番号.$B$9];2;0)" office:value-type="float" office:value="35" calcext:value-type="float">
            <text:p>35</text:p>
          </table:table-cell>
          <table:table-cell office:value-type="string" calcext:value-type="string">
            <text:p>R</text:p>
          </table:table-cell>
          <table:table-cell table:formula="of:=VLOOKUP([.I251];[$レアリティ番号.$A$1:$レアリティ番号.$B$4];2;0)" office:value-type="float" office:value="2" calcext:value-type="float">
            <text:p>2</text:p>
          </table:table-cell>
          <table:table-cell office:value-type="string" calcext:value-type="string">
            <text:p>イジン</text:p>
          </table:table-cell>
          <table:table-cell table:formula="of:=VLOOKUP([.K251];[$種類番号.$A$1:$種類番号.$B$4];2;0)" office:value-type="float" office:value="1" calcext:value-type="float">
            <text:p>1</text:p>
          </table:table-cell>
          <table:table-cell office:value-type="string" calcext:value-type="string">
            <text:p>青</text:p>
          </table:table-cell>
          <table:table-cell table:formula="of:=VLOOKUP([.M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Q251];[$能力語番号.$A$1:$能力語番号.$B$10];2;0);0)" office:value-type="float" office:value="8" calcext:value-type="float">
            <text:p>8</text:p>
          </table:table-cell>
          <table:table-cell office:value-type="string" calcext:value-type="string">
            <text:p>思想</text:p>
          </table:table-cell>
          <table:table-cell table:formula="of:=IFERROR(VLOOKUP([.$S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IF(ISNA([.$S251]);&quot;null&quot;;&quot;&quot;&quot;&quot;&amp;[.$S251]&amp;&quot;&quot;&quot;&quot;);[$JSON.$E$1];[.$U251];[$JSON.$F$1];IF(ISNA([.$W251]);&quot;null&quot;;&quot;&quot;&quot;&quot;&amp;[.$W251]&amp;&quot;&quot;&quot;&quot;);[$JSON.$G$1];[.$Y251];[$JSON.$H$1];[.$H251];[$JSON.$I$1];[.J251];[$JSON.$J$1];[.$L251];[$JSON.$K$1];[.$O251];[$JSON.$L$1];[.$N251];[$JSON.$M$1];[.$R251];[$JSON.$N$1];[.$T251];[$JSON.$O$1];IF(ISNA([.$V251]);&quot;null&quot;;[.$V251]);[$JSON.$P$1];[.$X251];[$JSON.$Q$1];[.$A251];[$JSON.$R$1];[.$B251];[$JSON.$S$1])" office:value-type="string" office:string-value="{&quot;id&quot;:&quot;3-22&quot;,&quot;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orderTable&quot;:250,&quot;orderDeck&quot;:40}," calcext:value-type="string">
            <text:p>{"id":"3-22","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G252];[$収録番号.$A$1:$収録番号.$B$9];2;0)" office:value-type="float" office:value="35" calcext:value-type="float">
            <text:p>35</text:p>
          </table:table-cell>
          <table:table-cell office:value-type="string" calcext:value-type="string">
            <text:p>N</text:p>
          </table:table-cell>
          <table:table-cell table:formula="of:=VLOOKUP([.I252];[$レアリティ番号.$A$1:$レアリティ番号.$B$4];2;0)" office:value-type="float" office:value="1" calcext:value-type="float">
            <text:p>1</text:p>
          </table:table-cell>
          <table:table-cell office:value-type="string" calcext:value-type="string">
            <text:p>イジン</text:p>
          </table:table-cell>
          <table:table-cell table:formula="of:=VLOOKUP([.K252];[$種類番号.$A$1:$種類番号.$B$4];2;0)" office:value-type="float" office:value="1" calcext:value-type="float">
            <text:p>1</text:p>
          </table:table-cell>
          <table:table-cell office:value-type="string" calcext:value-type="string">
            <text:p>青</text:p>
          </table:table-cell>
          <table:table-cell table:formula="of:=VLOOKUP([.M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IF(ISNA([.$S252]);&quot;null&quot;;&quot;&quot;&quot;&quot;&amp;[.$S252]&amp;&quot;&quot;&quot;&quot;);[$JSON.$E$1];[.$U252];[$JSON.$F$1];IF(ISNA([.$W252]);&quot;null&quot;;&quot;&quot;&quot;&quot;&amp;[.$W252]&amp;&quot;&quot;&quot;&quot;);[$JSON.$G$1];[.$Y252];[$JSON.$H$1];[.$H252];[$JSON.$I$1];[.J252];[$JSON.$J$1];[.$L252];[$JSON.$K$1];[.$O252];[$JSON.$L$1];[.$N252];[$JSON.$M$1];[.$R252];[$JSON.$N$1];[.$T252];[$JSON.$O$1];IF(ISNA([.$V252]);&quot;null&quot;;[.$V252]);[$JSON.$P$1];[.$X252];[$JSON.$Q$1];[.$A252];[$JSON.$R$1];[.$B252];[$JSON.$S$1])" office:value-type="string" office:string-value="{&quot;id&quot;:&quot;3-23&quot;,&quot;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orderTable&quot;:251,&quot;orderDeck&quot;:121}," calcext:value-type="string">
            <text:p>{"id":"3-23","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G253];[$収録番号.$A$1:$収録番号.$B$9];2;0)" office:value-type="float" office:value="35" calcext:value-type="float">
            <text:p>35</text:p>
          </table:table-cell>
          <table:table-cell office:value-type="string" calcext:value-type="string">
            <text:p>N</text:p>
          </table:table-cell>
          <table:table-cell table:formula="of:=VLOOKUP([.I253];[$レアリティ番号.$A$1:$レアリティ番号.$B$4];2;0)" office:value-type="float" office:value="1" calcext:value-type="float">
            <text:p>1</text:p>
          </table:table-cell>
          <table:table-cell office:value-type="string" calcext:value-type="string">
            <text:p>イジン</text:p>
          </table:table-cell>
          <table:table-cell table:formula="of:=VLOOKUP([.K253];[$種類番号.$A$1:$種類番号.$B$4];2;0)" office:value-type="float" office:value="1" calcext:value-type="float">
            <text:p>1</text:p>
          </table:table-cell>
          <table:table-cell office:value-type="string" calcext:value-type="string">
            <text:p>青</text:p>
          </table:table-cell>
          <table:table-cell table:formula="of:=VLOOKUP([.M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IF(ISNA([.$S253]);&quot;null&quot;;&quot;&quot;&quot;&quot;&amp;[.$S253]&amp;&quot;&quot;&quot;&quot;);[$JSON.$E$1];[.$U253];[$JSON.$F$1];IF(ISNA([.$W253]);&quot;null&quot;;&quot;&quot;&quot;&quot;&amp;[.$W253]&amp;&quot;&quot;&quot;&quot;);[$JSON.$G$1];[.$Y253];[$JSON.$H$1];[.$H253];[$JSON.$I$1];[.J253];[$JSON.$J$1];[.$L253];[$JSON.$K$1];[.$O253];[$JSON.$L$1];[.$N253];[$JSON.$M$1];[.$R253];[$JSON.$N$1];[.$T253];[$JSON.$O$1];IF(ISNA([.$V253]);&quot;null&quot;;[.$V253]);[$JSON.$P$1];[.$X253];[$JSON.$Q$1];[.$A253];[$JSON.$R$1];[.$B253];[$JSON.$S$1])" office:value-type="string" office:string-value="{&quot;id&quot;:&quot;3-24&quot;,&quot;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orderTable&quot;:252,&quot;orderDeck&quot;:161}," calcext:value-type="string">
            <text:p>{"id":"3-24","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G254];[$収録番号.$A$1:$収録番号.$B$9];2;0)" office:value-type="float" office:value="35" calcext:value-type="float">
            <text:p>35</text:p>
          </table:table-cell>
          <table:table-cell office:value-type="string" calcext:value-type="string">
            <text:p>N</text:p>
          </table:table-cell>
          <table:table-cell table:formula="of:=VLOOKUP([.I254];[$レアリティ番号.$A$1:$レアリティ番号.$B$4];2;0)" office:value-type="float" office:value="1" calcext:value-type="float">
            <text:p>1</text:p>
          </table:table-cell>
          <table:table-cell office:value-type="string" calcext:value-type="string">
            <text:p>イジン</text:p>
          </table:table-cell>
          <table:table-cell table:formula="of:=VLOOKUP([.K254];[$種類番号.$A$1:$種類番号.$B$4];2;0)" office:value-type="float" office:value="1" calcext:value-type="float">
            <text:p>1</text:p>
          </table:table-cell>
          <table:table-cell office:value-type="string" calcext:value-type="string">
            <text:p>青</text:p>
          </table:table-cell>
          <table:table-cell table:formula="of:=VLOOKUP([.M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IF(ISNA([.$S254]);&quot;null&quot;;&quot;&quot;&quot;&quot;&amp;[.$S254]&amp;&quot;&quot;&quot;&quot;);[$JSON.$E$1];[.$U254];[$JSON.$F$1];IF(ISNA([.$W254]);&quot;null&quot;;&quot;&quot;&quot;&quot;&amp;[.$W254]&amp;&quot;&quot;&quot;&quot;);[$JSON.$G$1];[.$Y254];[$JSON.$H$1];[.$H254];[$JSON.$I$1];[.J254];[$JSON.$J$1];[.$L254];[$JSON.$K$1];[.$O254];[$JSON.$L$1];[.$N254];[$JSON.$M$1];[.$R254];[$JSON.$N$1];[.$T254];[$JSON.$O$1];IF(ISNA([.$V254]);&quot;null&quot;;[.$V254]);[$JSON.$P$1];[.$X254];[$JSON.$Q$1];[.$A254];[$JSON.$R$1];[.$B254];[$JSON.$S$1])" office:value-type="string" office:string-value="{&quot;id&quot;:&quot;3-25&quot;,&quot;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orderTable&quot;:253,&quot;orderDeck&quot;:41}," calcext:value-type="string">
            <text:p>{"id":"3-25","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G255];[$収録番号.$A$1:$収録番号.$B$9];2;0)" office:value-type="float" office:value="35" calcext:value-type="float">
            <text:p>35</text:p>
          </table:table-cell>
          <table:table-cell office:value-type="string" calcext:value-type="string">
            <text:p>N</text:p>
          </table:table-cell>
          <table:table-cell table:formula="of:=VLOOKUP([.I255];[$レアリティ番号.$A$1:$レアリティ番号.$B$4];2;0)" office:value-type="float" office:value="1" calcext:value-type="float">
            <text:p>1</text:p>
          </table:table-cell>
          <table:table-cell office:value-type="string" calcext:value-type="string">
            <text:p>イジン</text:p>
          </table:table-cell>
          <table:table-cell table:formula="of:=VLOOKUP([.K255];[$種類番号.$A$1:$種類番号.$B$4];2;0)" office:value-type="float" office:value="1" calcext:value-type="float">
            <text:p>1</text:p>
          </table:table-cell>
          <table:table-cell office:value-type="string" calcext:value-type="string">
            <text:p>青</text:p>
          </table:table-cell>
          <table:table-cell table:formula="of:=VLOOKUP([.M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IF(ISNA([.$S255]);&quot;null&quot;;&quot;&quot;&quot;&quot;&amp;[.$S255]&amp;&quot;&quot;&quot;&quot;);[$JSON.$E$1];[.$U255];[$JSON.$F$1];IF(ISNA([.$W255]);&quot;null&quot;;&quot;&quot;&quot;&quot;&amp;[.$W255]&amp;&quot;&quot;&quot;&quot;);[$JSON.$G$1];[.$Y255];[$JSON.$H$1];[.$H255];[$JSON.$I$1];[.J255];[$JSON.$J$1];[.$L255];[$JSON.$K$1];[.$O255];[$JSON.$L$1];[.$N255];[$JSON.$M$1];[.$R255];[$JSON.$N$1];[.$T255];[$JSON.$O$1];IF(ISNA([.$V255]);&quot;null&quot;;[.$V255]);[$JSON.$P$1];[.$X255];[$JSON.$Q$1];[.$A255];[$JSON.$R$1];[.$B255];[$JSON.$S$1])" office:value-type="string" office:string-value="{&quot;id&quot;:&quot;3-26&quot;,&quot;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orderTable&quot;:254,&quot;orderDeck&quot;:10}," calcext:value-type="string">
            <text:p>{"id":"3-26","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G256];[$収録番号.$A$1:$収録番号.$B$9];2;0)" office:value-type="float" office:value="35" calcext:value-type="float">
            <text:p>35</text:p>
          </table:table-cell>
          <table:table-cell office:value-type="string" calcext:value-type="string">
            <text:p>R</text:p>
          </table:table-cell>
          <table:table-cell table:formula="of:=VLOOKUP([.I256];[$レアリティ番号.$A$1:$レアリティ番号.$B$4];2;0)" office:value-type="float" office:value="2" calcext:value-type="float">
            <text:p>2</text:p>
          </table:table-cell>
          <table:table-cell office:value-type="string" calcext:value-type="string">
            <text:p>イジン</text:p>
          </table:table-cell>
          <table:table-cell table:formula="of:=VLOOKUP([.K256];[$種類番号.$A$1:$種類番号.$B$4];2;0)" office:value-type="float" office:value="1" calcext:value-type="float">
            <text:p>1</text:p>
          </table:table-cell>
          <table:table-cell office:value-type="string" calcext:value-type="string">
            <text:p>緑</text:p>
          </table:table-cell>
          <table:table-cell table:formula="of:=VLOOKUP([.M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office:value-type="float" office:value="1000" calcext:value-type="float">
            <text:p>1000</text:p>
          </table:table-cell>
          <table:table-cell table:style-name="ce8" office:value-type="string" calcext:value-type="string">
            <text:p>木霊</text:p>
          </table:table-cell>
          <table:table-cell table:formula="of:=IFERROR(VLOOKUP([.$W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IF(ISNA([.$S256]);&quot;null&quot;;&quot;&quot;&quot;&quot;&amp;[.$S256]&amp;&quot;&quot;&quot;&quot;);[$JSON.$E$1];[.$U256];[$JSON.$F$1];IF(ISNA([.$W256]);&quot;null&quot;;&quot;&quot;&quot;&quot;&amp;[.$W256]&amp;&quot;&quot;&quot;&quot;);[$JSON.$G$1];[.$Y256];[$JSON.$H$1];[.$H256];[$JSON.$I$1];[.J256];[$JSON.$J$1];[.$L256];[$JSON.$K$1];[.$O256];[$JSON.$L$1];[.$N256];[$JSON.$M$1];[.$R256];[$JSON.$N$1];[.$T256];[$JSON.$O$1];IF(ISNA([.$V256]);&quot;null&quot;;[.$V256]);[$JSON.$P$1];[.$X256];[$JSON.$Q$1];[.$A256];[$JSON.$R$1];[.$B256];[$JSON.$S$1])" office:value-type="string" office:string-value="{&quot;id&quot;:&quot;3-27&quot;,&quot;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orderTable&quot;:255,&quot;orderDeck&quot;:90}," calcext:value-type="string">
            <text:p>{"id":"3-27","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G257];[$収録番号.$A$1:$収録番号.$B$9];2;0)" office:value-type="float" office:value="35" calcext:value-type="float">
            <text:p>35</text:p>
          </table:table-cell>
          <table:table-cell office:value-type="string" calcext:value-type="string">
            <text:p>N</text:p>
          </table:table-cell>
          <table:table-cell table:formula="of:=VLOOKUP([.I257];[$レアリティ番号.$A$1:$レアリティ番号.$B$4];2;0)" office:value-type="float" office:value="1" calcext:value-type="float">
            <text:p>1</text:p>
          </table:table-cell>
          <table:table-cell office:value-type="string" calcext:value-type="string">
            <text:p>イジン</text:p>
          </table:table-cell>
          <table:table-cell table:formula="of:=VLOOKUP([.K257];[$種類番号.$A$1:$種類番号.$B$4];2;0)" office:value-type="float" office:value="1" calcext:value-type="float">
            <text:p>1</text:p>
          </table:table-cell>
          <table:table-cell office:value-type="string" calcext:value-type="string">
            <text:p>緑</text:p>
          </table:table-cell>
          <table:table-cell table:formula="of:=VLOOKUP([.M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IF(ISNA([.$S257]);&quot;null&quot;;&quot;&quot;&quot;&quot;&amp;[.$S257]&amp;&quot;&quot;&quot;&quot;);[$JSON.$E$1];[.$U257];[$JSON.$F$1];IF(ISNA([.$W257]);&quot;null&quot;;&quot;&quot;&quot;&quot;&amp;[.$W257]&amp;&quot;&quot;&quot;&quot;);[$JSON.$G$1];[.$Y257];[$JSON.$H$1];[.$H257];[$JSON.$I$1];[.J257];[$JSON.$J$1];[.$L257];[$JSON.$K$1];[.$O257];[$JSON.$L$1];[.$N257];[$JSON.$M$1];[.$R257];[$JSON.$N$1];[.$T257];[$JSON.$O$1];IF(ISNA([.$V257]);&quot;null&quot;;[.$V257]);[$JSON.$P$1];[.$X257];[$JSON.$Q$1];[.$A257];[$JSON.$R$1];[.$B257];[$JSON.$S$1])" office:value-type="string" office:string-value="{&quot;id&quot;:&quot;3-28&quot;,&quot;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orderTable&quot;:256,&quot;orderDeck&quot;:91}," calcext:value-type="string">
            <text:p>{"id":"3-28","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G258];[$収録番号.$A$1:$収録番号.$B$9];2;0)" office:value-type="float" office:value="35" calcext:value-type="float">
            <text:p>35</text:p>
          </table:table-cell>
          <table:table-cell office:value-type="string" calcext:value-type="string">
            <text:p>N</text:p>
          </table:table-cell>
          <table:table-cell table:formula="of:=VLOOKUP([.I258];[$レアリティ番号.$A$1:$レアリティ番号.$B$4];2;0)" office:value-type="float" office:value="1" calcext:value-type="float">
            <text:p>1</text:p>
          </table:table-cell>
          <table:table-cell office:value-type="string" calcext:value-type="string">
            <text:p>イジン</text:p>
          </table:table-cell>
          <table:table-cell table:formula="of:=VLOOKUP([.K258];[$種類番号.$A$1:$種類番号.$B$4];2;0)" office:value-type="float" office:value="1" calcext:value-type="float">
            <text:p>1</text:p>
          </table:table-cell>
          <table:table-cell office:value-type="string" calcext:value-type="string">
            <text:p>緑</text:p>
          </table:table-cell>
          <table:table-cell table:formula="of:=VLOOKUP([.M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office:value-type="float" office:value="3000" calcext:value-type="float">
            <text:p>3000</text:p>
          </table:table-cell>
          <table:table-cell table:style-name="ce8" office:value-type="string" calcext:value-type="string">
            <text:p>木霊</text:p>
          </table:table-cell>
          <table:table-cell table:formula="of:=IFERROR(VLOOKUP([.$W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IF(ISNA([.$S258]);&quot;null&quot;;&quot;&quot;&quot;&quot;&amp;[.$S258]&amp;&quot;&quot;&quot;&quot;);[$JSON.$E$1];[.$U258];[$JSON.$F$1];IF(ISNA([.$W258]);&quot;null&quot;;&quot;&quot;&quot;&quot;&amp;[.$W258]&amp;&quot;&quot;&quot;&quot;);[$JSON.$G$1];[.$Y258];[$JSON.$H$1];[.$H258];[$JSON.$I$1];[.J258];[$JSON.$J$1];[.$L258];[$JSON.$K$1];[.$O258];[$JSON.$L$1];[.$N258];[$JSON.$M$1];[.$R258];[$JSON.$N$1];[.$T258];[$JSON.$O$1];IF(ISNA([.$V258]);&quot;null&quot;;[.$V258]);[$JSON.$P$1];[.$X258];[$JSON.$Q$1];[.$A258];[$JSON.$R$1];[.$B258];[$JSON.$S$1])" office:value-type="string" office:string-value="{&quot;id&quot;:&quot;3-29&quot;,&quot;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orderTable&quot;:257,&quot;orderDeck&quot;:129}," calcext:value-type="string">
            <text:p>{"id":"3-29","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G259];[$収録番号.$A$1:$収録番号.$B$9];2;0)" office:value-type="float" office:value="35" calcext:value-type="float">
            <text:p>35</text:p>
          </table:table-cell>
          <table:table-cell office:value-type="string" calcext:value-type="string">
            <text:p>N</text:p>
          </table:table-cell>
          <table:table-cell table:formula="of:=VLOOKUP([.I259];[$レアリティ番号.$A$1:$レアリティ番号.$B$4];2;0)" office:value-type="float" office:value="1" calcext:value-type="float">
            <text:p>1</text:p>
          </table:table-cell>
          <table:table-cell office:value-type="string" calcext:value-type="string">
            <text:p>イジン</text:p>
          </table:table-cell>
          <table:table-cell table:formula="of:=VLOOKUP([.K259];[$種類番号.$A$1:$種類番号.$B$4];2;0)" office:value-type="float" office:value="1" calcext:value-type="float">
            <text:p>1</text:p>
          </table:table-cell>
          <table:table-cell office:value-type="string" calcext:value-type="string">
            <text:p>緑</text:p>
          </table:table-cell>
          <table:table-cell table:formula="of:=VLOOKUP([.M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IF(ISNA([.$S259]);&quot;null&quot;;&quot;&quot;&quot;&quot;&amp;[.$S259]&amp;&quot;&quot;&quot;&quot;);[$JSON.$E$1];[.$U259];[$JSON.$F$1];IF(ISNA([.$W259]);&quot;null&quot;;&quot;&quot;&quot;&quot;&amp;[.$W259]&amp;&quot;&quot;&quot;&quot;);[$JSON.$G$1];[.$Y259];[$JSON.$H$1];[.$H259];[$JSON.$I$1];[.J259];[$JSON.$J$1];[.$L259];[$JSON.$K$1];[.$O259];[$JSON.$L$1];[.$N259];[$JSON.$M$1];[.$R259];[$JSON.$N$1];[.$T259];[$JSON.$O$1];IF(ISNA([.$V259]);&quot;null&quot;;[.$V259]);[$JSON.$P$1];[.$X259];[$JSON.$Q$1];[.$A259];[$JSON.$R$1];[.$B259];[$JSON.$S$1])" office:value-type="string" office:string-value="{&quot;id&quot;:&quot;3-30&quot;,&quot;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orderTable&quot;:258,&quot;orderDeck&quot;:48}," calcext:value-type="string">
            <text:p>{"id":"3-30","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G260];[$収録番号.$A$1:$収録番号.$B$9];2;0)" office:value-type="float" office:value="35" calcext:value-type="float">
            <text:p>35</text:p>
          </table:table-cell>
          <table:table-cell office:value-type="string" calcext:value-type="string">
            <text:p>R</text:p>
          </table:table-cell>
          <table:table-cell table:formula="of:=VLOOKUP([.I260];[$レアリティ番号.$A$1:$レアリティ番号.$B$4];2;0)" office:value-type="float" office:value="2" calcext:value-type="float">
            <text:p>2</text:p>
          </table:table-cell>
          <table:table-cell office:value-type="string" calcext:value-type="string">
            <text:p>イジン</text:p>
          </table:table-cell>
          <table:table-cell table:formula="of:=VLOOKUP([.K260];[$種類番号.$A$1:$種類番号.$B$4];2;0)" office:value-type="float" office:value="1" calcext:value-type="float">
            <text:p>1</text:p>
          </table:table-cell>
          <table:table-cell office:value-type="string" calcext:value-type="string">
            <text:p>緑</text:p>
          </table:table-cell>
          <table:table-cell table:formula="of:=VLOOKUP([.M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office:value-type="float" office:value="7000" calcext:value-type="float">
            <text:p>7000</text:p>
          </table:table-cell>
          <table:table-cell table:style-name="ce8" table:formula="of:=NA()" office:value-type="string" office:string-value="" calcext:value-type="error">
            <text:p>#N/A</text:p>
          </table:table-cell>
          <table:table-cell table:formula="of:=IFERROR(VLOOKUP([.$W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IF(ISNA([.$S260]);&quot;null&quot;;&quot;&quot;&quot;&quot;&amp;[.$S260]&amp;&quot;&quot;&quot;&quot;);[$JSON.$E$1];[.$U260];[$JSON.$F$1];IF(ISNA([.$W260]);&quot;null&quot;;&quot;&quot;&quot;&quot;&amp;[.$W260]&amp;&quot;&quot;&quot;&quot;);[$JSON.$G$1];[.$Y260];[$JSON.$H$1];[.$H260];[$JSON.$I$1];[.J260];[$JSON.$J$1];[.$L260];[$JSON.$K$1];[.$O260];[$JSON.$L$1];[.$N260];[$JSON.$M$1];[.$R260];[$JSON.$N$1];[.$T260];[$JSON.$O$1];IF(ISNA([.$V260]);&quot;null&quot;;[.$V260]);[$JSON.$P$1];[.$X260];[$JSON.$Q$1];[.$A260];[$JSON.$R$1];[.$B260];[$JSON.$S$1])" office:value-type="string" office:string-value="{&quot;id&quot;:&quot;3-31&quot;,&quot;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orderTable&quot;:259,&quot;orderDeck&quot;:231}," calcext:value-type="string">
            <text:p>{"id":"3-31","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G261];[$収録番号.$A$1:$収録番号.$B$9];2;0)" office:value-type="float" office:value="35" calcext:value-type="float">
            <text:p>35</text:p>
          </table:table-cell>
          <table:table-cell office:value-type="string" calcext:value-type="string">
            <text:p>N</text:p>
          </table:table-cell>
          <table:table-cell table:formula="of:=VLOOKUP([.I261];[$レアリティ番号.$A$1:$レアリティ番号.$B$4];2;0)" office:value-type="float" office:value="1" calcext:value-type="float">
            <text:p>1</text:p>
          </table:table-cell>
          <table:table-cell office:value-type="string" calcext:value-type="string">
            <text:p>イジン</text:p>
          </table:table-cell>
          <table:table-cell table:formula="of:=VLOOKUP([.K261];[$種類番号.$A$1:$種類番号.$B$4];2;0)" office:value-type="float" office:value="1" calcext:value-type="float">
            <text:p>1</text:p>
          </table:table-cell>
          <table:table-cell office:value-type="string" calcext:value-type="string">
            <text:p>緑</text:p>
          </table:table-cell>
          <table:table-cell table:formula="of:=VLOOKUP([.M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IF(ISNA([.$S261]);&quot;null&quot;;&quot;&quot;&quot;&quot;&amp;[.$S261]&amp;&quot;&quot;&quot;&quot;);[$JSON.$E$1];[.$U261];[$JSON.$F$1];IF(ISNA([.$W261]);&quot;null&quot;;&quot;&quot;&quot;&quot;&amp;[.$W261]&amp;&quot;&quot;&quot;&quot;);[$JSON.$G$1];[.$Y261];[$JSON.$H$1];[.$H261];[$JSON.$I$1];[.J261];[$JSON.$J$1];[.$L261];[$JSON.$K$1];[.$O261];[$JSON.$L$1];[.$N261];[$JSON.$M$1];[.$R261];[$JSON.$N$1];[.$T261];[$JSON.$O$1];IF(ISNA([.$V261]);&quot;null&quot;;[.$V261]);[$JSON.$P$1];[.$X261];[$JSON.$Q$1];[.$A261];[$JSON.$R$1];[.$B261];[$JSON.$S$1])" office:value-type="string" office:string-value="{&quot;id&quot;:&quot;3-32&quot;,&quot;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orderTable&quot;:260,&quot;orderDeck&quot;:14}," calcext:value-type="string">
            <text:p>{"id":"3-32","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G262];[$収録番号.$A$1:$収録番号.$B$9];2;0)" office:value-type="float" office:value="35" calcext:value-type="float">
            <text:p>35</text:p>
          </table:table-cell>
          <table:table-cell office:value-type="string" calcext:value-type="string">
            <text:p>N</text:p>
          </table:table-cell>
          <table:table-cell table:formula="of:=VLOOKUP([.I262];[$レアリティ番号.$A$1:$レアリティ番号.$B$4];2;0)" office:value-type="float" office:value="1" calcext:value-type="float">
            <text:p>1</text:p>
          </table:table-cell>
          <table:table-cell office:value-type="string" calcext:value-type="string">
            <text:p>イジン</text:p>
          </table:table-cell>
          <table:table-cell table:formula="of:=VLOOKUP([.K262];[$種類番号.$A$1:$種類番号.$B$4];2;0)" office:value-type="float" office:value="1" calcext:value-type="float">
            <text:p>1</text:p>
          </table:table-cell>
          <table:table-cell office:value-type="string" calcext:value-type="string">
            <text:p>緑</text:p>
          </table:table-cell>
          <table:table-cell table:formula="of:=VLOOKUP([.M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2];[$能力語番号.$A$1:$能力語番号.$B$10];2;0);0)" office:value-type="float" office:value="0" calcext:value-type="float">
            <text:p>0</text:p>
          </table:table-cell>
          <table:table-cell office:value-type="string" calcext:value-type="string">
            <text:p>医術</text:p>
          </table:table-cell>
          <table:table-cell table:formula="of:=IFERROR(VLOOKUP([.$S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IF(ISNA([.$S262]);&quot;null&quot;;&quot;&quot;&quot;&quot;&amp;[.$S262]&amp;&quot;&quot;&quot;&quot;);[$JSON.$E$1];[.$U262];[$JSON.$F$1];IF(ISNA([.$W262]);&quot;null&quot;;&quot;&quot;&quot;&quot;&amp;[.$W262]&amp;&quot;&quot;&quot;&quot;);[$JSON.$G$1];[.$Y262];[$JSON.$H$1];[.$H262];[$JSON.$I$1];[.J262];[$JSON.$J$1];[.$L262];[$JSON.$K$1];[.$O262];[$JSON.$L$1];[.$N262];[$JSON.$M$1];[.$R262];[$JSON.$N$1];[.$T262];[$JSON.$O$1];IF(ISNA([.$V262]);&quot;null&quot;;[.$V262]);[$JSON.$P$1];[.$X262];[$JSON.$Q$1];[.$A262];[$JSON.$R$1];[.$B262];[$JSON.$S$1])" office:value-type="string" office:string-value="{&quot;id&quot;:&quot;3-33&quot;,&quot;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orderTable&quot;:261,&quot;orderDeck&quot;:49}," calcext:value-type="string">
            <text:p>{"id":"3-33","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G263];[$収録番号.$A$1:$収録番号.$B$9];2;0)" office:value-type="float" office:value="35" calcext:value-type="float">
            <text:p>35</text:p>
          </table:table-cell>
          <table:table-cell office:value-type="string" calcext:value-type="string">
            <text:p>N</text:p>
          </table:table-cell>
          <table:table-cell table:formula="of:=VLOOKUP([.I263];[$レアリティ番号.$A$1:$レアリティ番号.$B$4];2;0)" office:value-type="float" office:value="1" calcext:value-type="float">
            <text:p>1</text:p>
          </table:table-cell>
          <table:table-cell office:value-type="string" calcext:value-type="string">
            <text:p>イジン</text:p>
          </table:table-cell>
          <table:table-cell table:formula="of:=VLOOKUP([.K263];[$種類番号.$A$1:$種類番号.$B$4];2;0)" office:value-type="float" office:value="1" calcext:value-type="float">
            <text:p>1</text:p>
          </table:table-cell>
          <table:table-cell office:value-type="string" calcext:value-type="string">
            <text:p>緑</text:p>
          </table:table-cell>
          <table:table-cell table:formula="of:=VLOOKUP([.M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3];[$能力語番号.$A$1:$能力語番号.$B$10];2;0);0)" office:value-type="float" office:value="0" calcext:value-type="float">
            <text:p>0</text:p>
          </table:table-cell>
          <table:table-cell office:value-type="string" calcext:value-type="string">
            <text:p>美術</text:p>
          </table:table-cell>
          <table:table-cell table:formula="of:=IFERROR(VLOOKUP([.$S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office:value-type="float" office:value="5000" calcext:value-type="float">
            <text:p>5000</text:p>
          </table:table-cell>
          <table:table-cell table:style-name="ce8" office:value-type="string" calcext:value-type="string">
            <text:p>魔力化</text:p>
          </table:table-cell>
          <table:table-cell table:formula="of:=IFERROR(VLOOKUP([.$W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IF(ISNA([.$S263]);&quot;null&quot;;&quot;&quot;&quot;&quot;&amp;[.$S263]&amp;&quot;&quot;&quot;&quot;);[$JSON.$E$1];[.$U263];[$JSON.$F$1];IF(ISNA([.$W263]);&quot;null&quot;;&quot;&quot;&quot;&quot;&amp;[.$W263]&amp;&quot;&quot;&quot;&quot;);[$JSON.$G$1];[.$Y263];[$JSON.$H$1];[.$H263];[$JSON.$I$1];[.J263];[$JSON.$J$1];[.$L263];[$JSON.$K$1];[.$O263];[$JSON.$L$1];[.$N263];[$JSON.$M$1];[.$R263];[$JSON.$N$1];[.$T263];[$JSON.$O$1];IF(ISNA([.$V263]);&quot;null&quot;;[.$V263]);[$JSON.$P$1];[.$X263];[$JSON.$Q$1];[.$A263];[$JSON.$R$1];[.$B263];[$JSON.$S$1])" office:value-type="string" office:string-value="{&quot;id&quot;:&quot;3-34&quot;,&quot;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orderTable&quot;:262,&quot;orderDeck&quot;:195}," calcext:value-type="string">
            <text:p>{"id":"3-34","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G264];[$収録番号.$A$1:$収録番号.$B$9];2;0)" office:value-type="float" office:value="35" calcext:value-type="float">
            <text:p>35</text:p>
          </table:table-cell>
          <table:table-cell office:value-type="string" calcext:value-type="string">
            <text:p>R</text:p>
          </table:table-cell>
          <table:table-cell table:formula="of:=VLOOKUP([.I264];[$レアリティ番号.$A$1:$レアリティ番号.$B$4];2;0)" office:value-type="float" office:value="2" calcext:value-type="float">
            <text:p>2</text:p>
          </table:table-cell>
          <table:table-cell office:value-type="string" calcext:value-type="string">
            <text:p>イジン</text:p>
          </table:table-cell>
          <table:table-cell table:formula="of:=VLOOKUP([.K264];[$種類番号.$A$1:$種類番号.$B$4];2;0)" office:value-type="float" office:value="1" calcext:value-type="float">
            <text:p>1</text:p>
          </table:table-cell>
          <table:table-cell office:value-type="string" calcext:value-type="string">
            <text:p>黄</text:p>
          </table:table-cell>
          <table:table-cell table:formula="of:=VLOOKUP([.M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office:value-type="float" office:value="1000" calcext:value-type="float">
            <text:p>1000</text:p>
          </table:table-cell>
          <table:table-cell table:style-name="ce8" office:value-type="string" calcext:value-type="string">
            <text:p>反魂</text:p>
          </table:table-cell>
          <table:table-cell table:formula="of:=IFERROR(VLOOKUP([.$W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IF(ISNA([.$S264]);&quot;null&quot;;&quot;&quot;&quot;&quot;&amp;[.$S264]&amp;&quot;&quot;&quot;&quot;);[$JSON.$E$1];[.$U264];[$JSON.$F$1];IF(ISNA([.$W264]);&quot;null&quot;;&quot;&quot;&quot;&quot;&amp;[.$W264]&amp;&quot;&quot;&quot;&quot;);[$JSON.$G$1];[.$Y264];[$JSON.$H$1];[.$H264];[$JSON.$I$1];[.J264];[$JSON.$J$1];[.$L264];[$JSON.$K$1];[.$O264];[$JSON.$L$1];[.$N264];[$JSON.$M$1];[.$R264];[$JSON.$N$1];[.$T264];[$JSON.$O$1];IF(ISNA([.$V264]);&quot;null&quot;;[.$V264]);[$JSON.$P$1];[.$X264];[$JSON.$Q$1];[.$A264];[$JSON.$R$1];[.$B264];[$JSON.$S$1])" office:value-type="string" office:string-value="{&quot;id&quot;:&quot;3-35&quot;,&quot;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orderTable&quot;:263,&quot;orderDeck&quot;:175}," calcext:value-type="string">
            <text:p>{"id":"3-35","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G265];[$収録番号.$A$1:$収録番号.$B$9];2;0)" office:value-type="float" office:value="35" calcext:value-type="float">
            <text:p>35</text:p>
          </table:table-cell>
          <table:table-cell office:value-type="string" calcext:value-type="string">
            <text:p>N</text:p>
          </table:table-cell>
          <table:table-cell table:formula="of:=VLOOKUP([.I265];[$レアリティ番号.$A$1:$レアリティ番号.$B$4];2;0)" office:value-type="float" office:value="1" calcext:value-type="float">
            <text:p>1</text:p>
          </table:table-cell>
          <table:table-cell office:value-type="string" calcext:value-type="string">
            <text:p>イジン</text:p>
          </table:table-cell>
          <table:table-cell table:formula="of:=VLOOKUP([.K265];[$種類番号.$A$1:$種類番号.$B$4];2;0)" office:value-type="float" office:value="1" calcext:value-type="float">
            <text:p>1</text:p>
          </table:table-cell>
          <table:table-cell office:value-type="string" calcext:value-type="string">
            <text:p>黄</text:p>
          </table:table-cell>
          <table:table-cell table:formula="of:=VLOOKUP([.M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5];[$能力語番号.$A$1:$能力語番号.$B$10];2;0);0)" office:value-type="float" office:value="0" calcext:value-type="float">
            <text:p>0</text:p>
          </table:table-cell>
          <table:table-cell office:value-type="string" calcext:value-type="string">
            <text:p>美術</text:p>
          </table:table-cell>
          <table:table-cell table:formula="of:=IFERROR(VLOOKUP([.$S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IF(ISNA([.$S265]);&quot;null&quot;;&quot;&quot;&quot;&quot;&amp;[.$S265]&amp;&quot;&quot;&quot;&quot;);[$JSON.$E$1];[.$U265];[$JSON.$F$1];IF(ISNA([.$W265]);&quot;null&quot;;&quot;&quot;&quot;&quot;&amp;[.$W265]&amp;&quot;&quot;&quot;&quot;);[$JSON.$G$1];[.$Y265];[$JSON.$H$1];[.$H265];[$JSON.$I$1];[.J265];[$JSON.$J$1];[.$L265];[$JSON.$K$1];[.$O265];[$JSON.$L$1];[.$N265];[$JSON.$M$1];[.$R265];[$JSON.$N$1];[.$T265];[$JSON.$O$1];IF(ISNA([.$V265]);&quot;null&quot;;[.$V265]);[$JSON.$P$1];[.$X265];[$JSON.$Q$1];[.$A265];[$JSON.$R$1];[.$B265];[$JSON.$S$1])" office:value-type="string" office:string-value="{&quot;id&quot;:&quot;3-36&quot;,&quot;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orderTable&quot;:264,&quot;orderDeck&quot;:19}," calcext:value-type="string">
            <text:p>{"id":"3-36","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G266];[$収録番号.$A$1:$収録番号.$B$9];2;0)" office:value-type="float" office:value="35" calcext:value-type="float">
            <text:p>35</text:p>
          </table:table-cell>
          <table:table-cell office:value-type="string" calcext:value-type="string">
            <text:p>N</text:p>
          </table:table-cell>
          <table:table-cell table:formula="of:=VLOOKUP([.I266];[$レアリティ番号.$A$1:$レアリティ番号.$B$4];2;0)" office:value-type="float" office:value="1" calcext:value-type="float">
            <text:p>1</text:p>
          </table:table-cell>
          <table:table-cell office:value-type="string" calcext:value-type="string">
            <text:p>イジン</text:p>
          </table:table-cell>
          <table:table-cell table:formula="of:=VLOOKUP([.K266];[$種類番号.$A$1:$種類番号.$B$4];2;0)" office:value-type="float" office:value="1" calcext:value-type="float">
            <text:p>1</text:p>
          </table:table-cell>
          <table:table-cell office:value-type="string" calcext:value-type="string">
            <text:p>黄</text:p>
          </table:table-cell>
          <table:table-cell table:formula="of:=VLOOKUP([.M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6];[$能力語番号.$A$1:$能力語番号.$B$10];2;0);0)" office:value-type="float" office:value="0" calcext:value-type="float">
            <text:p>0</text:p>
          </table:table-cell>
          <table:table-cell office:value-type="string" calcext:value-type="string">
            <text:p>美術</text:p>
          </table:table-cell>
          <table:table-cell table:formula="of:=IFERROR(VLOOKUP([.$S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office:value-type="float" office:value="5500" calcext:value-type="float">
            <text:p>5500</text:p>
          </table:table-cell>
          <table:table-cell table:style-name="ce8" table:formula="of:=NA()" office:value-type="string" office:string-value="" calcext:value-type="error">
            <text:p>#N/A</text:p>
          </table:table-cell>
          <table:table-cell table:formula="of:=IFERROR(VLOOKUP([.$W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IF(ISNA([.$S266]);&quot;null&quot;;&quot;&quot;&quot;&quot;&amp;[.$S266]&amp;&quot;&quot;&quot;&quot;);[$JSON.$E$1];[.$U266];[$JSON.$F$1];IF(ISNA([.$W266]);&quot;null&quot;;&quot;&quot;&quot;&quot;&amp;[.$W266]&amp;&quot;&quot;&quot;&quot;);[$JSON.$G$1];[.$Y266];[$JSON.$H$1];[.$H266];[$JSON.$I$1];[.J266];[$JSON.$J$1];[.$L266];[$JSON.$K$1];[.$O266];[$JSON.$L$1];[.$N266];[$JSON.$M$1];[.$R266];[$JSON.$N$1];[.$T266];[$JSON.$O$1];IF(ISNA([.$V266]);&quot;null&quot;;[.$V266]);[$JSON.$P$1];[.$X266];[$JSON.$Q$1];[.$A266];[$JSON.$R$1];[.$B266];[$JSON.$S$1])" office:value-type="string" office:string-value="{&quot;id&quot;:&quot;3-37&quot;,&quot;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orderTable&quot;:265,&quot;orderDeck&quot;:198}," calcext:value-type="string">
            <text:p>{"id":"3-37","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G267];[$収録番号.$A$1:$収録番号.$B$9];2;0)" office:value-type="float" office:value="35" calcext:value-type="float">
            <text:p>35</text:p>
          </table:table-cell>
          <table:table-cell office:value-type="string" calcext:value-type="string">
            <text:p>N</text:p>
          </table:table-cell>
          <table:table-cell table:formula="of:=VLOOKUP([.I267];[$レアリティ番号.$A$1:$レアリティ番号.$B$4];2;0)" office:value-type="float" office:value="1" calcext:value-type="float">
            <text:p>1</text:p>
          </table:table-cell>
          <table:table-cell office:value-type="string" calcext:value-type="string">
            <text:p>イジン</text:p>
          </table:table-cell>
          <table:table-cell table:formula="of:=VLOOKUP([.K267];[$種類番号.$A$1:$種類番号.$B$4];2;0)" office:value-type="float" office:value="1" calcext:value-type="float">
            <text:p>1</text:p>
          </table:table-cell>
          <table:table-cell office:value-type="string" calcext:value-type="string">
            <text:p>黄</text:p>
          </table:table-cell>
          <table:table-cell table:formula="of:=VLOOKUP([.M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office:value-type="float" office:value="3000" calcext:value-type="float">
            <text:p>3000</text:p>
          </table:table-cell>
          <table:table-cell table:style-name="ce8" office:value-type="string" calcext:value-type="string">
            <text:p>反魂</text:p>
          </table:table-cell>
          <table:table-cell table:formula="of:=IFERROR(VLOOKUP([.$W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IF(ISNA([.$S267]);&quot;null&quot;;&quot;&quot;&quot;&quot;&amp;[.$S267]&amp;&quot;&quot;&quot;&quot;);[$JSON.$E$1];[.$U267];[$JSON.$F$1];IF(ISNA([.$W267]);&quot;null&quot;;&quot;&quot;&quot;&quot;&amp;[.$W267]&amp;&quot;&quot;&quot;&quot;);[$JSON.$G$1];[.$Y267];[$JSON.$H$1];[.$H267];[$JSON.$I$1];[.J267];[$JSON.$J$1];[.$L267];[$JSON.$K$1];[.$O267];[$JSON.$L$1];[.$N267];[$JSON.$M$1];[.$R267];[$JSON.$N$1];[.$T267];[$JSON.$O$1];IF(ISNA([.$V267]);&quot;null&quot;;[.$V267]);[$JSON.$P$1];[.$X267];[$JSON.$Q$1];[.$A267];[$JSON.$R$1];[.$B267];[$JSON.$S$1])" office:value-type="string" office:string-value="{&quot;id&quot;:&quot;3-38&quot;,&quot;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orderTable&quot;:266,&quot;orderDeck&quot;:233}," calcext:value-type="string">
            <text:p>{"id":"3-38","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G268];[$収録番号.$A$1:$収録番号.$B$9];2;0)" office:value-type="float" office:value="35" calcext:value-type="float">
            <text:p>35</text:p>
          </table:table-cell>
          <table:table-cell office:value-type="string" calcext:value-type="string">
            <text:p>N</text:p>
          </table:table-cell>
          <table:table-cell table:formula="of:=VLOOKUP([.I268];[$レアリティ番号.$A$1:$レアリティ番号.$B$4];2;0)" office:value-type="float" office:value="1" calcext:value-type="float">
            <text:p>1</text:p>
          </table:table-cell>
          <table:table-cell office:value-type="string" calcext:value-type="string">
            <text:p>イジン</text:p>
          </table:table-cell>
          <table:table-cell table:formula="of:=VLOOKUP([.K268];[$種類番号.$A$1:$種類番号.$B$4];2;0)" office:value-type="float" office:value="1" calcext:value-type="float">
            <text:p>1</text:p>
          </table:table-cell>
          <table:table-cell office:value-type="string" calcext:value-type="string">
            <text:p>黄</text:p>
          </table:table-cell>
          <table:table-cell table:formula="of:=VLOOKUP([.M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office:value-type="float" office:value="7000" calcext:value-type="float">
            <text:p>7000</text:p>
          </table:table-cell>
          <table:table-cell table:style-name="ce8" office:value-type="string" calcext:value-type="string">
            <text:p>魔力化</text:p>
          </table:table-cell>
          <table:table-cell table:formula="of:=IFERROR(VLOOKUP([.$W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IF(ISNA([.$S268]);&quot;null&quot;;&quot;&quot;&quot;&quot;&amp;[.$S268]&amp;&quot;&quot;&quot;&quot;);[$JSON.$E$1];[.$U268];[$JSON.$F$1];IF(ISNA([.$W268]);&quot;null&quot;;&quot;&quot;&quot;&quot;&amp;[.$W268]&amp;&quot;&quot;&quot;&quot;);[$JSON.$G$1];[.$Y268];[$JSON.$H$1];[.$H268];[$JSON.$I$1];[.J268];[$JSON.$J$1];[.$L268];[$JSON.$K$1];[.$O268];[$JSON.$L$1];[.$N268];[$JSON.$M$1];[.$R268];[$JSON.$N$1];[.$T268];[$JSON.$O$1];IF(ISNA([.$V268]);&quot;null&quot;;[.$V268]);[$JSON.$P$1];[.$X268];[$JSON.$Q$1];[.$A268];[$JSON.$R$1];[.$B268];[$JSON.$S$1])" office:value-type="string" office:string-value="{&quot;id&quot;:&quot;3-39&quot;,&quot;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orderTable&quot;:267,&quot;orderDeck&quot;:227}," calcext:value-type="string">
            <text:p>{"id":"3-39","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G269];[$収録番号.$A$1:$収録番号.$B$9];2;0)" office:value-type="float" office:value="35" calcext:value-type="float">
            <text:p>35</text:p>
          </table:table-cell>
          <table:table-cell office:value-type="string" calcext:value-type="string">
            <text:p>N</text:p>
          </table:table-cell>
          <table:table-cell table:formula="of:=VLOOKUP([.I269];[$レアリティ番号.$A$1:$レアリティ番号.$B$4];2;0)" office:value-type="float" office:value="1" calcext:value-type="float">
            <text:p>1</text:p>
          </table:table-cell>
          <table:table-cell office:value-type="string" calcext:value-type="string">
            <text:p>イジン</text:p>
          </table:table-cell>
          <table:table-cell table:formula="of:=VLOOKUP([.K269];[$種類番号.$A$1:$種類番号.$B$4];2;0)" office:value-type="float" office:value="1" calcext:value-type="float">
            <text:p>1</text:p>
          </table:table-cell>
          <table:table-cell office:value-type="string" calcext:value-type="string">
            <text:p>黄</text:p>
          </table:table-cell>
          <table:table-cell table:formula="of:=VLOOKUP([.M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office:value-type="float" office:value="2500" calcext:value-type="float">
            <text:p>2500</text:p>
          </table:table-cell>
          <table:table-cell table:style-name="ce8" table:formula="of:=NA()" office:value-type="string" office:string-value="" calcext:value-type="error">
            <text:p>#N/A</text:p>
          </table:table-cell>
          <table:table-cell table:formula="of:=IFERROR(VLOOKUP([.$W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IF(ISNA([.$S269]);&quot;null&quot;;&quot;&quot;&quot;&quot;&amp;[.$S269]&amp;&quot;&quot;&quot;&quot;);[$JSON.$E$1];[.$U269];[$JSON.$F$1];IF(ISNA([.$W269]);&quot;null&quot;;&quot;&quot;&quot;&quot;&amp;[.$W269]&amp;&quot;&quot;&quot;&quot;);[$JSON.$G$1];[.$Y269];[$JSON.$H$1];[.$H269];[$JSON.$I$1];[.J269];[$JSON.$J$1];[.$L269];[$JSON.$K$1];[.$O269];[$JSON.$L$1];[.$N269];[$JSON.$M$1];[.$R269];[$JSON.$N$1];[.$T269];[$JSON.$O$1];IF(ISNA([.$V269]);&quot;null&quot;;[.$V269]);[$JSON.$P$1];[.$X269];[$JSON.$Q$1];[.$A269];[$JSON.$R$1];[.$B269];[$JSON.$S$1])" office:value-type="string" office:string-value="{&quot;id&quot;:&quot;3-40&quot;,&quot;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orderTable&quot;:268,&quot;orderDeck&quot;:98}," calcext:value-type="string">
            <text:p>{"id":"3-40","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G270];[$収録番号.$A$1:$収録番号.$B$9];2;0)" office:value-type="float" office:value="35" calcext:value-type="float">
            <text:p>35</text:p>
          </table:table-cell>
          <table:table-cell office:value-type="string" calcext:value-type="string">
            <text:p>N</text:p>
          </table:table-cell>
          <table:table-cell table:formula="of:=VLOOKUP([.I270];[$レアリティ番号.$A$1:$レアリティ番号.$B$4];2;0)" office:value-type="float" office:value="1" calcext:value-type="float">
            <text:p>1</text:p>
          </table:table-cell>
          <table:table-cell office:value-type="string" calcext:value-type="string">
            <text:p>イジン</text:p>
          </table:table-cell>
          <table:table-cell table:formula="of:=VLOOKUP([.K270];[$種類番号.$A$1:$種類番号.$B$4];2;0)" office:value-type="float" office:value="1" calcext:value-type="float">
            <text:p>1</text:p>
          </table:table-cell>
          <table:table-cell office:value-type="string" calcext:value-type="string">
            <text:p>黄</text:p>
          </table:table-cell>
          <table:table-cell table:formula="of:=VLOOKUP([.M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office:value-type="float" office:value="6000" calcext:value-type="float">
            <text:p>6000</text:p>
          </table:table-cell>
          <table:table-cell table:style-name="ce8" office:value-type="string" calcext:value-type="string">
            <text:p>山札の上か下に戻す</text:p>
          </table:table-cell>
          <table:table-cell table:formula="of:=IFERROR(VLOOKUP([.$W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IF(ISNA([.$S270]);&quot;null&quot;;&quot;&quot;&quot;&quot;&amp;[.$S270]&amp;&quot;&quot;&quot;&quot;);[$JSON.$E$1];[.$U270];[$JSON.$F$1];IF(ISNA([.$W270]);&quot;null&quot;;&quot;&quot;&quot;&quot;&amp;[.$W270]&amp;&quot;&quot;&quot;&quot;);[$JSON.$G$1];[.$Y270];[$JSON.$H$1];[.$H270];[$JSON.$I$1];[.J270];[$JSON.$J$1];[.$L270];[$JSON.$K$1];[.$O270];[$JSON.$L$1];[.$N270];[$JSON.$M$1];[.$R270];[$JSON.$N$1];[.$T270];[$JSON.$O$1];IF(ISNA([.$V270]);&quot;null&quot;;[.$V270]);[$JSON.$P$1];[.$X270];[$JSON.$Q$1];[.$A270];[$JSON.$R$1];[.$B270];[$JSON.$S$1])" office:value-type="string" office:string-value="{&quot;id&quot;:&quot;3-41&quot;,&quot;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orderTable&quot;:269,&quot;orderDeck&quot;:216}," calcext:value-type="string">
            <text:p>{"id":"3-41","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G271];[$収録番号.$A$1:$収録番号.$B$9];2;0)" office:value-type="float" office:value="35" calcext:value-type="float">
            <text:p>35</text:p>
          </table:table-cell>
          <table:table-cell office:value-type="string" calcext:value-type="string">
            <text:p>R</text:p>
          </table:table-cell>
          <table:table-cell table:formula="of:=VLOOKUP([.I271];[$レアリティ番号.$A$1:$レアリティ番号.$B$4];2;0)" office:value-type="float" office:value="2" calcext:value-type="float">
            <text:p>2</text:p>
          </table:table-cell>
          <table:table-cell office:value-type="string" calcext:value-type="string">
            <text:p>イジン</text:p>
          </table:table-cell>
          <table:table-cell table:formula="of:=VLOOKUP([.K271];[$種類番号.$A$1:$種類番号.$B$4];2;0)" office:value-type="float" office:value="1" calcext:value-type="float">
            <text:p>1</text:p>
          </table:table-cell>
          <table:table-cell office:value-type="string" calcext:value-type="string">
            <text:p>黄</text:p>
          </table:table-cell>
          <table:table-cell table:formula="of:=VLOOKUP([.M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office:value-type="float" office:value="500" calcext:value-type="float">
            <text:p>500</text:p>
          </table:table-cell>
          <table:table-cell table:style-name="ce8" table:formula="of:=NA()" office:value-type="string" office:string-value="" calcext:value-type="error">
            <text:p>#N/A</text:p>
          </table:table-cell>
          <table:table-cell table:formula="of:=IFERROR(VLOOKUP([.$W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IF(ISNA([.$S271]);&quot;null&quot;;&quot;&quot;&quot;&quot;&amp;[.$S271]&amp;&quot;&quot;&quot;&quot;);[$JSON.$E$1];[.$U271];[$JSON.$F$1];IF(ISNA([.$W271]);&quot;null&quot;;&quot;&quot;&quot;&quot;&amp;[.$W271]&amp;&quot;&quot;&quot;&quot;);[$JSON.$G$1];[.$Y271];[$JSON.$H$1];[.$H271];[$JSON.$I$1];[.J271];[$JSON.$J$1];[.$L271];[$JSON.$K$1];[.$O271];[$JSON.$L$1];[.$N271];[$JSON.$M$1];[.$R271];[$JSON.$N$1];[.$T271];[$JSON.$O$1];IF(ISNA([.$V271]);&quot;null&quot;;[.$V271]);[$JSON.$P$1];[.$X271];[$JSON.$Q$1];[.$A271];[$JSON.$R$1];[.$B271];[$JSON.$S$1])" office:value-type="string" office:string-value="{&quot;id&quot;:&quot;3-42&quot;,&quot;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orderTable&quot;:270,&quot;orderDeck&quot;:56}," calcext:value-type="string">
            <text:p>{"id":"3-42","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G272];[$収録番号.$A$1:$収録番号.$B$9];2;0)" office:value-type="float" office:value="35" calcext:value-type="float">
            <text:p>35</text:p>
          </table:table-cell>
          <table:table-cell office:value-type="string" calcext:value-type="string">
            <text:p>N</text:p>
          </table:table-cell>
          <table:table-cell table:formula="of:=VLOOKUP([.I272];[$レアリティ番号.$A$1:$レアリティ番号.$B$4];2;0)" office:value-type="float" office:value="1" calcext:value-type="float">
            <text:p>1</text:p>
          </table:table-cell>
          <table:table-cell office:value-type="string" calcext:value-type="string">
            <text:p>イジン</text:p>
          </table:table-cell>
          <table:table-cell table:formula="of:=VLOOKUP([.K272];[$種類番号.$A$1:$種類番号.$B$4];2;0)" office:value-type="float" office:value="1" calcext:value-type="float">
            <text:p>1</text:p>
          </table:table-cell>
          <table:table-cell office:value-type="string" calcext:value-type="string">
            <text:p>紫</text:p>
          </table:table-cell>
          <table:table-cell table:formula="of:=VLOOKUP([.M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2];[$能力語番号.$A$1:$能力語番号.$B$10];2;0);0)" office:value-type="float" office:value="0" calcext:value-type="float">
            <text:p>0</text:p>
          </table:table-cell>
          <table:table-cell office:value-type="string" calcext:value-type="string">
            <text:p>志願</text:p>
          </table:table-cell>
          <table:table-cell table:formula="of:=IFERROR(VLOOKUP([.$S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office:value-type="float" office:value="500" calcext:value-type="float">
            <text:p>500</text:p>
          </table:table-cell>
          <table:table-cell table:style-name="ce8" office:value-type="string" calcext:value-type="string">
            <text:p>1ドローする</text:p>
          </table:table-cell>
          <table:table-cell table:formula="of:=IFERROR(VLOOKUP([.$W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IF(ISNA([.$S272]);&quot;null&quot;;&quot;&quot;&quot;&quot;&amp;[.$S272]&amp;&quot;&quot;&quot;&quot;);[$JSON.$E$1];[.$U272];[$JSON.$F$1];IF(ISNA([.$W272]);&quot;null&quot;;&quot;&quot;&quot;&quot;&amp;[.$W272]&amp;&quot;&quot;&quot;&quot;);[$JSON.$G$1];[.$Y272];[$JSON.$H$1];[.$H272];[$JSON.$I$1];[.J272];[$JSON.$J$1];[.$L272];[$JSON.$K$1];[.$O272];[$JSON.$L$1];[.$N272];[$JSON.$M$1];[.$R272];[$JSON.$N$1];[.$T272];[$JSON.$O$1];IF(ISNA([.$V272]);&quot;null&quot;;[.$V272]);[$JSON.$P$1];[.$X272];[$JSON.$Q$1];[.$A272];[$JSON.$R$1];[.$B272];[$JSON.$S$1])" office:value-type="string" office:string-value="{&quot;id&quot;:&quot;3-43&quot;,&quot;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orderTable&quot;:271,&quot;orderDeck&quot;:21}," calcext:value-type="string">
            <text:p>{"id":"3-43","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G273];[$収録番号.$A$1:$収録番号.$B$9];2;0)" office:value-type="float" office:value="35" calcext:value-type="float">
            <text:p>35</text:p>
          </table:table-cell>
          <table:table-cell office:value-type="string" calcext:value-type="string">
            <text:p>N</text:p>
          </table:table-cell>
          <table:table-cell table:formula="of:=VLOOKUP([.I273];[$レアリティ番号.$A$1:$レアリティ番号.$B$4];2;0)" office:value-type="float" office:value="1" calcext:value-type="float">
            <text:p>1</text:p>
          </table:table-cell>
          <table:table-cell office:value-type="string" calcext:value-type="string">
            <text:p>イジン</text:p>
          </table:table-cell>
          <table:table-cell table:formula="of:=VLOOKUP([.K273];[$種類番号.$A$1:$種類番号.$B$4];2;0)" office:value-type="float" office:value="1" calcext:value-type="float">
            <text:p>1</text:p>
          </table:table-cell>
          <table:table-cell office:value-type="string" calcext:value-type="string">
            <text:p>紫</text:p>
          </table:table-cell>
          <table:table-cell table:formula="of:=VLOOKUP([.M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3];[$能力語番号.$A$1:$能力語番号.$B$10];2;0);0)" office:value-type="float" office:value="0" calcext:value-type="float">
            <text:p>0</text:p>
          </table:table-cell>
          <table:table-cell office:value-type="string" calcext:value-type="string">
            <text:p>医術</text:p>
          </table:table-cell>
          <table:table-cell table:formula="of:=IFERROR(VLOOKUP([.$S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office:value-type="float" office:value="3500" calcext:value-type="float">
            <text:p>3500</text:p>
          </table:table-cell>
          <table:table-cell table:style-name="ce8" office:value-type="string" calcext:value-type="string">
            <text:p>木霊</text:p>
          </table:table-cell>
          <table:table-cell table:formula="of:=IFERROR(VLOOKUP([.$W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IF(ISNA([.$S273]);&quot;null&quot;;&quot;&quot;&quot;&quot;&amp;[.$S273]&amp;&quot;&quot;&quot;&quot;);[$JSON.$E$1];[.$U273];[$JSON.$F$1];IF(ISNA([.$W273]);&quot;null&quot;;&quot;&quot;&quot;&quot;&amp;[.$W273]&amp;&quot;&quot;&quot;&quot;);[$JSON.$G$1];[.$Y273];[$JSON.$H$1];[.$H273];[$JSON.$I$1];[.J273];[$JSON.$J$1];[.$L273];[$JSON.$K$1];[.$O273];[$JSON.$L$1];[.$N273];[$JSON.$M$1];[.$R273];[$JSON.$N$1];[.$T273];[$JSON.$O$1];IF(ISNA([.$V273]);&quot;null&quot;;[.$V273]);[$JSON.$P$1];[.$X273];[$JSON.$Q$1];[.$A273];[$JSON.$R$1];[.$B273];[$JSON.$S$1])" office:value-type="string" office:string-value="{&quot;id&quot;:&quot;3-44&quot;,&quot;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orderTable&quot;:272,&quot;orderDeck&quot;:141}," calcext:value-type="string">
            <text:p>{"id":"3-44","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G274];[$収録番号.$A$1:$収録番号.$B$9];2;0)" office:value-type="float" office:value="35" calcext:value-type="float">
            <text:p>35</text:p>
          </table:table-cell>
          <table:table-cell office:value-type="string" calcext:value-type="string">
            <text:p>R</text:p>
          </table:table-cell>
          <table:table-cell table:formula="of:=VLOOKUP([.I274];[$レアリティ番号.$A$1:$レアリティ番号.$B$4];2;0)" office:value-type="float" office:value="2" calcext:value-type="float">
            <text:p>2</text:p>
          </table:table-cell>
          <table:table-cell office:value-type="string" calcext:value-type="string">
            <text:p>イジン</text:p>
          </table:table-cell>
          <table:table-cell table:formula="of:=VLOOKUP([.K274];[$種類番号.$A$1:$種類番号.$B$4];2;0)" office:value-type="float" office:value="1" calcext:value-type="float">
            <text:p>1</text:p>
          </table:table-cell>
          <table:table-cell office:value-type="string" calcext:value-type="string">
            <text:p>紫</text:p>
          </table:table-cell>
          <table:table-cell table:formula="of:=VLOOKUP([.M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office:value-type="float" office:value="3000" calcext:value-type="float">
            <text:p>3000</text:p>
          </table:table-cell>
          <table:table-cell table:style-name="ce8" table:formula="of:=NA()" office:value-type="string" office:string-value="" calcext:value-type="error">
            <text:p>#N/A</text:p>
          </table:table-cell>
          <table:table-cell table:formula="of:=IFERROR(VLOOKUP([.$W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IF(ISNA([.$S274]);&quot;null&quot;;&quot;&quot;&quot;&quot;&amp;[.$S274]&amp;&quot;&quot;&quot;&quot;);[$JSON.$E$1];[.$U274];[$JSON.$F$1];IF(ISNA([.$W274]);&quot;null&quot;;&quot;&quot;&quot;&quot;&amp;[.$W274]&amp;&quot;&quot;&quot;&quot;);[$JSON.$G$1];[.$Y274];[$JSON.$H$1];[.$H274];[$JSON.$I$1];[.J274];[$JSON.$J$1];[.$L274];[$JSON.$K$1];[.$O274];[$JSON.$L$1];[.$N274];[$JSON.$M$1];[.$R274];[$JSON.$N$1];[.$T274];[$JSON.$O$1];IF(ISNA([.$V274]);&quot;null&quot;;[.$V274]);[$JSON.$P$1];[.$X274];[$JSON.$Q$1];[.$A274];[$JSON.$R$1];[.$B274];[$JSON.$S$1])" office:value-type="string" office:string-value="{&quot;id&quot;:&quot;3-45&quot;,&quot;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orderTable&quot;:273,&quot;orderDeck&quot;:103}," calcext:value-type="string">
            <text:p>{"id":"3-45","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G275];[$収録番号.$A$1:$収録番号.$B$9];2;0)" office:value-type="float" office:value="35" calcext:value-type="float">
            <text:p>35</text:p>
          </table:table-cell>
          <table:table-cell office:value-type="string" calcext:value-type="string">
            <text:p>N</text:p>
          </table:table-cell>
          <table:table-cell table:formula="of:=VLOOKUP([.I275];[$レアリティ番号.$A$1:$レアリティ番号.$B$4];2;0)" office:value-type="float" office:value="1" calcext:value-type="float">
            <text:p>1</text:p>
          </table:table-cell>
          <table:table-cell office:value-type="string" calcext:value-type="string">
            <text:p>イジン</text:p>
          </table:table-cell>
          <table:table-cell table:formula="of:=VLOOKUP([.K275];[$種類番号.$A$1:$種類番号.$B$4];2;0)" office:value-type="float" office:value="1" calcext:value-type="float">
            <text:p>1</text:p>
          </table:table-cell>
          <table:table-cell office:value-type="string" calcext:value-type="string">
            <text:p>紫</text:p>
          </table:table-cell>
          <table:table-cell table:formula="of:=VLOOKUP([.M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5];[$能力語番号.$A$1:$能力語番号.$B$10];2;0);0)" office:value-type="float" office:value="0" calcext:value-type="float">
            <text:p>0</text:p>
          </table:table-cell>
          <table:table-cell office:value-type="string" calcext:value-type="string">
            <text:p>志願</text:p>
          </table:table-cell>
          <table:table-cell table:formula="of:=IFERROR(VLOOKUP([.$S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IF(ISNA([.$S275]);&quot;null&quot;;&quot;&quot;&quot;&quot;&amp;[.$S275]&amp;&quot;&quot;&quot;&quot;);[$JSON.$E$1];[.$U275];[$JSON.$F$1];IF(ISNA([.$W275]);&quot;null&quot;;&quot;&quot;&quot;&quot;&amp;[.$W275]&amp;&quot;&quot;&quot;&quot;);[$JSON.$G$1];[.$Y275];[$JSON.$H$1];[.$H275];[$JSON.$I$1];[.J275];[$JSON.$J$1];[.$L275];[$JSON.$K$1];[.$O275];[$JSON.$L$1];[.$N275];[$JSON.$M$1];[.$R275];[$JSON.$N$1];[.$T275];[$JSON.$O$1];IF(ISNA([.$V275]);&quot;null&quot;;[.$V275]);[$JSON.$P$1];[.$X275];[$JSON.$Q$1];[.$A275];[$JSON.$R$1];[.$B275];[$JSON.$S$1])" office:value-type="string" office:string-value="{&quot;id&quot;:&quot;3-46&quot;,&quot;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orderTable&quot;:274,&quot;orderDeck&quot;:218}," calcext:value-type="string">
            <text:p>{"id":"3-46","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G276];[$収録番号.$A$1:$収録番号.$B$9];2;0)" office:value-type="float" office:value="35" calcext:value-type="float">
            <text:p>35</text:p>
          </table:table-cell>
          <table:table-cell office:value-type="string" calcext:value-type="string">
            <text:p>N</text:p>
          </table:table-cell>
          <table:table-cell table:formula="of:=VLOOKUP([.I276];[$レアリティ番号.$A$1:$レアリティ番号.$B$4];2;0)" office:value-type="float" office:value="1" calcext:value-type="float">
            <text:p>1</text:p>
          </table:table-cell>
          <table:table-cell office:value-type="string" calcext:value-type="string">
            <text:p>イジン</text:p>
          </table:table-cell>
          <table:table-cell table:formula="of:=VLOOKUP([.K276];[$種類番号.$A$1:$種類番号.$B$4];2;0)" office:value-type="float" office:value="1" calcext:value-type="float">
            <text:p>1</text:p>
          </table:table-cell>
          <table:table-cell office:value-type="string" calcext:value-type="string">
            <text:p>紫</text:p>
          </table:table-cell>
          <table:table-cell table:formula="of:=VLOOKUP([.M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IF(ISNA([.$S276]);&quot;null&quot;;&quot;&quot;&quot;&quot;&amp;[.$S276]&amp;&quot;&quot;&quot;&quot;);[$JSON.$E$1];[.$U276];[$JSON.$F$1];IF(ISNA([.$W276]);&quot;null&quot;;&quot;&quot;&quot;&quot;&amp;[.$W276]&amp;&quot;&quot;&quot;&quot;);[$JSON.$G$1];[.$Y276];[$JSON.$H$1];[.$H276];[$JSON.$I$1];[.J276];[$JSON.$J$1];[.$L276];[$JSON.$K$1];[.$O276];[$JSON.$L$1];[.$N276];[$JSON.$M$1];[.$R276];[$JSON.$N$1];[.$T276];[$JSON.$O$1];IF(ISNA([.$V276]);&quot;null&quot;;[.$V276]);[$JSON.$P$1];[.$X276];[$JSON.$Q$1];[.$A276];[$JSON.$R$1];[.$B276];[$JSON.$S$1])" office:value-type="string" office:string-value="{&quot;id&quot;:&quot;3-47&quot;,&quot;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orderTable&quot;:275,&quot;orderDeck&quot;:22}," calcext:value-type="string">
            <text:p>{"id":"3-47","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G277];[$収録番号.$A$1:$収録番号.$B$9];2;0)" office:value-type="float" office:value="35" calcext:value-type="float">
            <text:p>35</text:p>
          </table:table-cell>
          <table:table-cell office:value-type="string" calcext:value-type="string">
            <text:p>R</text:p>
          </table:table-cell>
          <table:table-cell table:formula="of:=VLOOKUP([.I277];[$レアリティ番号.$A$1:$レアリティ番号.$B$4];2;0)" office:value-type="float" office:value="2" calcext:value-type="float">
            <text:p>2</text:p>
          </table:table-cell>
          <table:table-cell office:value-type="string" calcext:value-type="string">
            <text:p>イジン</text:p>
          </table:table-cell>
          <table:table-cell table:formula="of:=VLOOKUP([.K277];[$種類番号.$A$1:$種類番号.$B$4];2;0)" office:value-type="float" office:value="1" calcext:value-type="float">
            <text:p>1</text:p>
          </table:table-cell>
          <table:table-cell office:value-type="string" calcext:value-type="string">
            <text:p>紫</text:p>
          </table:table-cell>
          <table:table-cell table:formula="of:=VLOOKUP([.M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office:value-type="float" office:value="3500" calcext:value-type="float">
            <text:p>3500</text:p>
          </table:table-cell>
          <table:table-cell table:style-name="ce8" table:formula="of:=NA()" office:value-type="string" office:string-value="" calcext:value-type="error">
            <text:p>#N/A</text:p>
          </table:table-cell>
          <table:table-cell table:formula="of:=IFERROR(VLOOKUP([.$W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IF(ISNA([.$S277]);&quot;null&quot;;&quot;&quot;&quot;&quot;&amp;[.$S277]&amp;&quot;&quot;&quot;&quot;);[$JSON.$E$1];[.$U277];[$JSON.$F$1];IF(ISNA([.$W277]);&quot;null&quot;;&quot;&quot;&quot;&quot;&amp;[.$W277]&amp;&quot;&quot;&quot;&quot;);[$JSON.$G$1];[.$Y277];[$JSON.$H$1];[.$H277];[$JSON.$I$1];[.J277];[$JSON.$J$1];[.$L277];[$JSON.$K$1];[.$O277];[$JSON.$L$1];[.$N277];[$JSON.$M$1];[.$R277];[$JSON.$N$1];[.$T277];[$JSON.$O$1];IF(ISNA([.$V277]);&quot;null&quot;;[.$V277]);[$JSON.$P$1];[.$X277];[$JSON.$Q$1];[.$A277];[$JSON.$R$1];[.$B277];[$JSON.$S$1])" office:value-type="string" office:string-value="{&quot;id&quot;:&quot;3-48&quot;,&quot;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orderTable&quot;:276,&quot;orderDeck&quot;:142}," calcext:value-type="string">
            <text:p>{"id":"3-48","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G278];[$収録番号.$A$1:$収録番号.$B$9];2;0)" office:value-type="float" office:value="35" calcext:value-type="float">
            <text:p>35</text:p>
          </table:table-cell>
          <table:table-cell office:value-type="string" calcext:value-type="string">
            <text:p>N</text:p>
          </table:table-cell>
          <table:table-cell table:formula="of:=VLOOKUP([.I278];[$レアリティ番号.$A$1:$レアリティ番号.$B$4];2;0)" office:value-type="float" office:value="1" calcext:value-type="float">
            <text:p>1</text:p>
          </table:table-cell>
          <table:table-cell office:value-type="string" calcext:value-type="string">
            <text:p>イジン</text:p>
          </table:table-cell>
          <table:table-cell table:formula="of:=VLOOKUP([.K278];[$種類番号.$A$1:$種類番号.$B$4];2;0)" office:value-type="float" office:value="1" calcext:value-type="float">
            <text:p>1</text:p>
          </table:table-cell>
          <table:table-cell office:value-type="string" calcext:value-type="string">
            <text:p>紫</text:p>
          </table:table-cell>
          <table:table-cell table:formula="of:=VLOOKUP([.M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Q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office:value-type="float" office:value="7500" calcext:value-type="float">
            <text:p>7500</text:p>
          </table:table-cell>
          <table:table-cell table:style-name="ce8" table:formula="of:=NA()" office:value-type="string" office:string-value="" calcext:value-type="error">
            <text:p>#N/A</text:p>
          </table:table-cell>
          <table:table-cell table:formula="of:=IFERROR(VLOOKUP([.$W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IF(ISNA([.$S278]);&quot;null&quot;;&quot;&quot;&quot;&quot;&amp;[.$S278]&amp;&quot;&quot;&quot;&quot;);[$JSON.$E$1];[.$U278];[$JSON.$F$1];IF(ISNA([.$W278]);&quot;null&quot;;&quot;&quot;&quot;&quot;&amp;[.$W278]&amp;&quot;&quot;&quot;&quot;);[$JSON.$G$1];[.$Y278];[$JSON.$H$1];[.$H278];[$JSON.$I$1];[.J278];[$JSON.$J$1];[.$L278];[$JSON.$K$1];[.$O278];[$JSON.$L$1];[.$N278];[$JSON.$M$1];[.$R278];[$JSON.$N$1];[.$T278];[$JSON.$O$1];IF(ISNA([.$V278]);&quot;null&quot;;[.$V278]);[$JSON.$P$1];[.$X278];[$JSON.$Q$1];[.$A278];[$JSON.$R$1];[.$B278];[$JSON.$S$1])" office:value-type="string" office:string-value="{&quot;id&quot;:&quot;3-49&quot;,&quot;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orderTable&quot;:277,&quot;orderDeck&quot;:228}," calcext:value-type="string">
            <text:p>{"id":"3-49","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G279];[$収録番号.$A$1:$収録番号.$B$9];2;0)" office:value-type="float" office:value="35" calcext:value-type="float">
            <text:p>35</text:p>
          </table:table-cell>
          <table:table-cell office:value-type="string" calcext:value-type="string">
            <text:p>N</text:p>
          </table:table-cell>
          <table:table-cell table:formula="of:=VLOOKUP([.I279];[$レアリティ番号.$A$1:$レアリティ番号.$B$4];2;0)" office:value-type="float" office:value="1" calcext:value-type="float">
            <text:p>1</text:p>
          </table:table-cell>
          <table:table-cell office:value-type="string" calcext:value-type="string">
            <text:p>イジン</text:p>
          </table:table-cell>
          <table:table-cell table:formula="of:=VLOOKUP([.K279];[$種類番号.$A$1:$種類番号.$B$4];2;0)" office:value-type="float" office:value="1" calcext:value-type="float">
            <text:p>1</text:p>
          </table:table-cell>
          <table:table-cell office:value-type="string" calcext:value-type="string">
            <text:p>紫</text:p>
          </table:table-cell>
          <table:table-cell table:formula="of:=VLOOKUP([.M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office:value-type="float" office:value="2000" calcext:value-type="float">
            <text:p>2000</text:p>
          </table:table-cell>
          <table:table-cell table:style-name="ce8" office:value-type="string" calcext:value-type="string">
            <text:p>魔力化</text:p>
          </table:table-cell>
          <table:table-cell table:formula="of:=IFERROR(VLOOKUP([.$W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IF(ISNA([.$S279]);&quot;null&quot;;&quot;&quot;&quot;&quot;&amp;[.$S279]&amp;&quot;&quot;&quot;&quot;);[$JSON.$E$1];[.$U279];[$JSON.$F$1];IF(ISNA([.$W279]);&quot;null&quot;;&quot;&quot;&quot;&quot;&amp;[.$W279]&amp;&quot;&quot;&quot;&quot;);[$JSON.$G$1];[.$Y279];[$JSON.$H$1];[.$H279];[$JSON.$I$1];[.J279];[$JSON.$J$1];[.$L279];[$JSON.$K$1];[.$O279];[$JSON.$L$1];[.$N279];[$JSON.$M$1];[.$R279];[$JSON.$N$1];[.$T279];[$JSON.$O$1];IF(ISNA([.$V279]);&quot;null&quot;;[.$V279]);[$JSON.$P$1];[.$X279];[$JSON.$Q$1];[.$A279];[$JSON.$R$1];[.$B279];[$JSON.$S$1])" office:value-type="string" office:string-value="{&quot;id&quot;:&quot;3-50&quot;,&quot;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orderTable&quot;:278,&quot;orderDeck&quot;:104}," calcext:value-type="string">
            <text:p>{"id":"3-50","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G280];[$収録番号.$A$1:$収録番号.$B$9];2;0)" office:value-type="float" office:value="35" calcext:value-type="float">
            <text:p>35</text:p>
          </table:table-cell>
          <table:table-cell office:value-type="string" calcext:value-type="string">
            <text:p>N</text:p>
          </table:table-cell>
          <table:table-cell table:formula="of:=VLOOKUP([.I280];[$レアリティ番号.$A$1:$レアリティ番号.$B$4];2;0)" office:value-type="float" office:value="1" calcext:value-type="float">
            <text:p>1</text:p>
          </table:table-cell>
          <table:table-cell office:value-type="string" calcext:value-type="string">
            <text:p>ハイケイ</text:p>
          </table:table-cell>
          <table:table-cell table:formula="of:=VLOOKUP([.K280];[$種類番号.$A$1:$種類番号.$B$4];2;0)" office:value-type="float" office:value="2" calcext:value-type="float">
            <text:p>2</text:p>
          </table:table-cell>
          <table:table-cell office:value-type="string" calcext:value-type="string">
            <text:p>赤</text:p>
          </table:table-cell>
          <table:table-cell table:formula="of:=VLOOKUP([.M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IF(ISNA([.$S280]);&quot;null&quot;;&quot;&quot;&quot;&quot;&amp;[.$S280]&amp;&quot;&quot;&quot;&quot;);[$JSON.$E$1];[.$U280];[$JSON.$F$1];IF(ISNA([.$W280]);&quot;null&quot;;&quot;&quot;&quot;&quot;&amp;[.$W280]&amp;&quot;&quot;&quot;&quot;);[$JSON.$G$1];[.$Y280];[$JSON.$H$1];[.$H280];[$JSON.$I$1];[.J280];[$JSON.$J$1];[.$L280];[$JSON.$K$1];[.$O280];[$JSON.$L$1];[.$N280];[$JSON.$M$1];[.$R280];[$JSON.$N$1];[.$T280];[$JSON.$O$1];IF(ISNA([.$V280]);&quot;null&quot;;[.$V280]);[$JSON.$P$1];[.$X280];[$JSON.$Q$1];[.$A280];[$JSON.$R$1];[.$B280];[$JSON.$S$1])" office:value-type="string" office:string-value="{&quot;id&quot;:&quot;3-51&quot;,&quot;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orderTable&quot;:279,&quot;orderDeck&quot;:249}," calcext:value-type="string">
            <text:p>{"id":"3-51","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G281];[$収録番号.$A$1:$収録番号.$B$9];2;0)" office:value-type="float" office:value="35" calcext:value-type="float">
            <text:p>35</text:p>
          </table:table-cell>
          <table:table-cell office:value-type="string" calcext:value-type="string">
            <text:p>N</text:p>
          </table:table-cell>
          <table:table-cell table:formula="of:=VLOOKUP([.I281];[$レアリティ番号.$A$1:$レアリティ番号.$B$4];2;0)" office:value-type="float" office:value="1" calcext:value-type="float">
            <text:p>1</text:p>
          </table:table-cell>
          <table:table-cell office:value-type="string" calcext:value-type="string">
            <text:p>ハイケイ</text:p>
          </table:table-cell>
          <table:table-cell table:formula="of:=VLOOKUP([.K281];[$種類番号.$A$1:$種類番号.$B$4];2;0)" office:value-type="float" office:value="2" calcext:value-type="float">
            <text:p>2</text:p>
          </table:table-cell>
          <table:table-cell office:value-type="string" calcext:value-type="string">
            <text:p>赤</text:p>
          </table:table-cell>
          <table:table-cell table:formula="of:=VLOOKUP([.M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IF(ISNA([.$S281]);&quot;null&quot;;&quot;&quot;&quot;&quot;&amp;[.$S281]&amp;&quot;&quot;&quot;&quot;);[$JSON.$E$1];[.$U281];[$JSON.$F$1];IF(ISNA([.$W281]);&quot;null&quot;;&quot;&quot;&quot;&quot;&amp;[.$W281]&amp;&quot;&quot;&quot;&quot;);[$JSON.$G$1];[.$Y281];[$JSON.$H$1];[.$H281];[$JSON.$I$1];[.J281];[$JSON.$J$1];[.$L281];[$JSON.$K$1];[.$O281];[$JSON.$L$1];[.$N281];[$JSON.$M$1];[.$R281];[$JSON.$N$1];[.$T281];[$JSON.$O$1];IF(ISNA([.$V281]);&quot;null&quot;;[.$V281]);[$JSON.$P$1];[.$X281];[$JSON.$Q$1];[.$A281];[$JSON.$R$1];[.$B281];[$JSON.$S$1])" office:value-type="string" office:string-value="{&quot;id&quot;:&quot;3-52&quot;,&quot;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orderTable&quot;:280,&quot;orderDeck&quot;:237}," calcext:value-type="string">
            <text:p>{"id":"3-52","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G282];[$収録番号.$A$1:$収録番号.$B$9];2;0)" office:value-type="float" office:value="35" calcext:value-type="float">
            <text:p>35</text:p>
          </table:table-cell>
          <table:table-cell office:value-type="string" calcext:value-type="string">
            <text:p>N</text:p>
          </table:table-cell>
          <table:table-cell table:formula="of:=VLOOKUP([.I282];[$レアリティ番号.$A$1:$レアリティ番号.$B$4];2;0)" office:value-type="float" office:value="1" calcext:value-type="float">
            <text:p>1</text:p>
          </table:table-cell>
          <table:table-cell office:value-type="string" calcext:value-type="string">
            <text:p>ハイケイ</text:p>
          </table:table-cell>
          <table:table-cell table:formula="of:=VLOOKUP([.K282];[$種類番号.$A$1:$種類番号.$B$4];2;0)" office:value-type="float" office:value="2" calcext:value-type="float">
            <text:p>2</text:p>
          </table:table-cell>
          <table:table-cell office:value-type="string" calcext:value-type="string">
            <text:p>青</text:p>
          </table:table-cell>
          <table:table-cell table:formula="of:=VLOOKUP([.M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IF(ISNA([.$S282]);&quot;null&quot;;&quot;&quot;&quot;&quot;&amp;[.$S282]&amp;&quot;&quot;&quot;&quot;);[$JSON.$E$1];[.$U282];[$JSON.$F$1];IF(ISNA([.$W282]);&quot;null&quot;;&quot;&quot;&quot;&quot;&amp;[.$W282]&amp;&quot;&quot;&quot;&quot;);[$JSON.$G$1];[.$Y282];[$JSON.$H$1];[.$H282];[$JSON.$I$1];[.J282];[$JSON.$J$1];[.$L282];[$JSON.$K$1];[.$O282];[$JSON.$L$1];[.$N282];[$JSON.$M$1];[.$R282];[$JSON.$N$1];[.$T282];[$JSON.$O$1];IF(ISNA([.$V282]);&quot;null&quot;;[.$V282]);[$JSON.$P$1];[.$X282];[$JSON.$Q$1];[.$A282];[$JSON.$R$1];[.$B282];[$JSON.$S$1])" office:value-type="string" office:string-value="{&quot;id&quot;:&quot;3-53&quot;,&quot;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orderTable&quot;:281,&quot;orderDeck&quot;:262}," calcext:value-type="string">
            <text:p>{"id":"3-53","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G283];[$収録番号.$A$1:$収録番号.$B$9];2;0)" office:value-type="float" office:value="35" calcext:value-type="float">
            <text:p>35</text:p>
          </table:table-cell>
          <table:table-cell office:value-type="string" calcext:value-type="string">
            <text:p>N</text:p>
          </table:table-cell>
          <table:table-cell table:formula="of:=VLOOKUP([.I283];[$レアリティ番号.$A$1:$レアリティ番号.$B$4];2;0)" office:value-type="float" office:value="1" calcext:value-type="float">
            <text:p>1</text:p>
          </table:table-cell>
          <table:table-cell office:value-type="string" calcext:value-type="string">
            <text:p>ハイケイ</text:p>
          </table:table-cell>
          <table:table-cell table:formula="of:=VLOOKUP([.K283];[$種類番号.$A$1:$種類番号.$B$4];2;0)" office:value-type="float" office:value="2" calcext:value-type="float">
            <text:p>2</text:p>
          </table:table-cell>
          <table:table-cell office:value-type="string" calcext:value-type="string">
            <text:p>青</text:p>
          </table:table-cell>
          <table:table-cell table:formula="of:=VLOOKUP([.M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IF(ISNA([.$S283]);&quot;null&quot;;&quot;&quot;&quot;&quot;&amp;[.$S283]&amp;&quot;&quot;&quot;&quot;);[$JSON.$E$1];[.$U283];[$JSON.$F$1];IF(ISNA([.$W283]);&quot;null&quot;;&quot;&quot;&quot;&quot;&amp;[.$W283]&amp;&quot;&quot;&quot;&quot;);[$JSON.$G$1];[.$Y283];[$JSON.$H$1];[.$H283];[$JSON.$I$1];[.J283];[$JSON.$J$1];[.$L283];[$JSON.$K$1];[.$O283];[$JSON.$L$1];[.$N283];[$JSON.$M$1];[.$R283];[$JSON.$N$1];[.$T283];[$JSON.$O$1];IF(ISNA([.$V283]);&quot;null&quot;;[.$V283]);[$JSON.$P$1];[.$X283];[$JSON.$Q$1];[.$A283];[$JSON.$R$1];[.$B283];[$JSON.$S$1])" office:value-type="string" office:string-value="{&quot;id&quot;:&quot;3-54&quot;,&quot;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orderTable&quot;:282,&quot;orderDeck&quot;:268}," calcext:value-type="string">
            <text:p>{"id":"3-54","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G284];[$収録番号.$A$1:$収録番号.$B$9];2;0)" office:value-type="float" office:value="35" calcext:value-type="float">
            <text:p>35</text:p>
          </table:table-cell>
          <table:table-cell office:value-type="string" calcext:value-type="string">
            <text:p>N</text:p>
          </table:table-cell>
          <table:table-cell table:formula="of:=VLOOKUP([.I284];[$レアリティ番号.$A$1:$レアリティ番号.$B$4];2;0)" office:value-type="float" office:value="1" calcext:value-type="float">
            <text:p>1</text:p>
          </table:table-cell>
          <table:table-cell office:value-type="string" calcext:value-type="string">
            <text:p>ハイケイ</text:p>
          </table:table-cell>
          <table:table-cell table:formula="of:=VLOOKUP([.K284];[$種類番号.$A$1:$種類番号.$B$4];2;0)" office:value-type="float" office:value="2" calcext:value-type="float">
            <text:p>2</text:p>
          </table:table-cell>
          <table:table-cell office:value-type="string" calcext:value-type="string">
            <text:p>緑</text:p>
          </table:table-cell>
          <table:table-cell table:formula="of:=VLOOKUP([.M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IF(ISNA([.$S284]);&quot;null&quot;;&quot;&quot;&quot;&quot;&amp;[.$S284]&amp;&quot;&quot;&quot;&quot;);[$JSON.$E$1];[.$U284];[$JSON.$F$1];IF(ISNA([.$W284]);&quot;null&quot;;&quot;&quot;&quot;&quot;&amp;[.$W284]&amp;&quot;&quot;&quot;&quot;);[$JSON.$G$1];[.$Y284];[$JSON.$H$1];[.$H284];[$JSON.$I$1];[.J284];[$JSON.$J$1];[.$L284];[$JSON.$K$1];[.$O284];[$JSON.$L$1];[.$N284];[$JSON.$M$1];[.$R284];[$JSON.$N$1];[.$T284];[$JSON.$O$1];IF(ISNA([.$V284]);&quot;null&quot;;[.$V284]);[$JSON.$P$1];[.$X284];[$JSON.$Q$1];[.$A284];[$JSON.$R$1];[.$B284];[$JSON.$S$1])" office:value-type="string" office:string-value="{&quot;id&quot;:&quot;3-55&quot;,&quot;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orderTable&quot;:283,&quot;orderDeck&quot;:253}," calcext:value-type="string">
            <text:p>{"id":"3-55","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G285];[$収録番号.$A$1:$収録番号.$B$9];2;0)" office:value-type="float" office:value="35" calcext:value-type="float">
            <text:p>35</text:p>
          </table:table-cell>
          <table:table-cell office:value-type="string" calcext:value-type="string">
            <text:p>N</text:p>
          </table:table-cell>
          <table:table-cell table:formula="of:=VLOOKUP([.I285];[$レアリティ番号.$A$1:$レアリティ番号.$B$4];2;0)" office:value-type="float" office:value="1" calcext:value-type="float">
            <text:p>1</text:p>
          </table:table-cell>
          <table:table-cell office:value-type="string" calcext:value-type="string">
            <text:p>ハイケイ</text:p>
          </table:table-cell>
          <table:table-cell table:formula="of:=VLOOKUP([.K285];[$種類番号.$A$1:$種類番号.$B$4];2;0)" office:value-type="float" office:value="2" calcext:value-type="float">
            <text:p>2</text:p>
          </table:table-cell>
          <table:table-cell office:value-type="string" calcext:value-type="string">
            <text:p>緑</text:p>
          </table:table-cell>
          <table:table-cell table:formula="of:=VLOOKUP([.M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Q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formula="of:=NA()" office:value-type="string" office:string-value="" calcext:value-type="error">
            <text:p>#N/A</text:p>
          </table:table-cell>
          <table:table-cell table:style-name="ce8" office:value-type="string" calcext:value-type="string">
            <text:p>木霊</text:p>
          </table:table-cell>
          <table:table-cell table:formula="of:=IFERROR(VLOOKUP([.$W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IF(ISNA([.$S285]);&quot;null&quot;;&quot;&quot;&quot;&quot;&amp;[.$S285]&amp;&quot;&quot;&quot;&quot;);[$JSON.$E$1];[.$U285];[$JSON.$F$1];IF(ISNA([.$W285]);&quot;null&quot;;&quot;&quot;&quot;&quot;&amp;[.$W285]&amp;&quot;&quot;&quot;&quot;);[$JSON.$G$1];[.$Y285];[$JSON.$H$1];[.$H285];[$JSON.$I$1];[.J285];[$JSON.$J$1];[.$L285];[$JSON.$K$1];[.$O285];[$JSON.$L$1];[.$N285];[$JSON.$M$1];[.$R285];[$JSON.$N$1];[.$T285];[$JSON.$O$1];IF(ISNA([.$V285]);&quot;null&quot;;[.$V285]);[$JSON.$P$1];[.$X285];[$JSON.$Q$1];[.$A285];[$JSON.$R$1];[.$B285];[$JSON.$S$1])" office:value-type="string" office:string-value="{&quot;id&quot;:&quot;3-56&quot;,&quot;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orderTable&quot;:284,&quot;orderDeck&quot;:270}," calcext:value-type="string">
            <text:p>{"id":"3-56","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G286];[$収録番号.$A$1:$収録番号.$B$9];2;0)" office:value-type="float" office:value="35" calcext:value-type="float">
            <text:p>35</text:p>
          </table:table-cell>
          <table:table-cell office:value-type="string" calcext:value-type="string">
            <text:p>N</text:p>
          </table:table-cell>
          <table:table-cell table:formula="of:=VLOOKUP([.I286];[$レアリティ番号.$A$1:$レアリティ番号.$B$4];2;0)" office:value-type="float" office:value="1" calcext:value-type="float">
            <text:p>1</text:p>
          </table:table-cell>
          <table:table-cell office:value-type="string" calcext:value-type="string">
            <text:p>ハイケイ</text:p>
          </table:table-cell>
          <table:table-cell table:formula="of:=VLOOKUP([.K286];[$種類番号.$A$1:$種類番号.$B$4];2;0)" office:value-type="float" office:value="2" calcext:value-type="float">
            <text:p>2</text:p>
          </table:table-cell>
          <table:table-cell office:value-type="string" calcext:value-type="string">
            <text:p>黄</text:p>
          </table:table-cell>
          <table:table-cell table:formula="of:=VLOOKUP([.M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6];[$能力語番号.$A$1:$能力語番号.$B$10];2;0);0)" office:value-type="float" office:value="0" calcext:value-type="float">
            <text:p>0</text:p>
          </table:table-cell>
          <table:table-cell office:value-type="string" calcext:value-type="string">
            <text:p>美術</text:p>
          </table:table-cell>
          <table:table-cell table:formula="of:=IFERROR(VLOOKUP([.$S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IF(ISNA([.$S286]);&quot;null&quot;;&quot;&quot;&quot;&quot;&amp;[.$S286]&amp;&quot;&quot;&quot;&quot;);[$JSON.$E$1];[.$U286];[$JSON.$F$1];IF(ISNA([.$W286]);&quot;null&quot;;&quot;&quot;&quot;&quot;&amp;[.$W286]&amp;&quot;&quot;&quot;&quot;);[$JSON.$G$1];[.$Y286];[$JSON.$H$1];[.$H286];[$JSON.$I$1];[.J286];[$JSON.$J$1];[.$L286];[$JSON.$K$1];[.$O286];[$JSON.$L$1];[.$N286];[$JSON.$M$1];[.$R286];[$JSON.$N$1];[.$T286];[$JSON.$O$1];IF(ISNA([.$V286]);&quot;null&quot;;[.$V286]);[$JSON.$P$1];[.$X286];[$JSON.$Q$1];[.$A286];[$JSON.$R$1];[.$B286];[$JSON.$S$1])" office:value-type="string" office:string-value="{&quot;id&quot;:&quot;3-57&quot;,&quot;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orderTable&quot;:285,&quot;orderDeck&quot;:264}," calcext:value-type="string">
            <text:p>{"id":"3-57","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G287];[$収録番号.$A$1:$収録番号.$B$9];2;0)" office:value-type="float" office:value="35" calcext:value-type="float">
            <text:p>35</text:p>
          </table:table-cell>
          <table:table-cell office:value-type="string" calcext:value-type="string">
            <text:p>N</text:p>
          </table:table-cell>
          <table:table-cell table:formula="of:=VLOOKUP([.I287];[$レアリティ番号.$A$1:$レアリティ番号.$B$4];2;0)" office:value-type="float" office:value="1" calcext:value-type="float">
            <text:p>1</text:p>
          </table:table-cell>
          <table:table-cell office:value-type="string" calcext:value-type="string">
            <text:p>ハイケイ</text:p>
          </table:table-cell>
          <table:table-cell table:formula="of:=VLOOKUP([.K287];[$種類番号.$A$1:$種類番号.$B$4];2;0)" office:value-type="float" office:value="2" calcext:value-type="float">
            <text:p>2</text:p>
          </table:table-cell>
          <table:table-cell office:value-type="string" calcext:value-type="string">
            <text:p>黄</text:p>
          </table:table-cell>
          <table:table-cell table:formula="of:=VLOOKUP([.M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IF(ISNA([.$S287]);&quot;null&quot;;&quot;&quot;&quot;&quot;&amp;[.$S287]&amp;&quot;&quot;&quot;&quot;);[$JSON.$E$1];[.$U287];[$JSON.$F$1];IF(ISNA([.$W287]);&quot;null&quot;;&quot;&quot;&quot;&quot;&amp;[.$W287]&amp;&quot;&quot;&quot;&quot;);[$JSON.$G$1];[.$Y287];[$JSON.$H$1];[.$H287];[$JSON.$I$1];[.J287];[$JSON.$J$1];[.$L287];[$JSON.$K$1];[.$O287];[$JSON.$L$1];[.$N287];[$JSON.$M$1];[.$R287];[$JSON.$N$1];[.$T287];[$JSON.$O$1];IF(ISNA([.$V287]);&quot;null&quot;;[.$V287]);[$JSON.$P$1];[.$X287];[$JSON.$Q$1];[.$A287];[$JSON.$R$1];[.$B287];[$JSON.$S$1])" office:value-type="string" office:string-value="{&quot;id&quot;:&quot;3-58&quot;,&quot;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orderTable&quot;:286,&quot;orderDeck&quot;:257}," calcext:value-type="string">
            <text:p>{"id":"3-58","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G288];[$収録番号.$A$1:$収録番号.$B$9];2;0)" office:value-type="float" office:value="35" calcext:value-type="float">
            <text:p>35</text:p>
          </table:table-cell>
          <table:table-cell office:value-type="string" calcext:value-type="string">
            <text:p>N</text:p>
          </table:table-cell>
          <table:table-cell table:formula="of:=VLOOKUP([.I288];[$レアリティ番号.$A$1:$レアリティ番号.$B$4];2;0)" office:value-type="float" office:value="1" calcext:value-type="float">
            <text:p>1</text:p>
          </table:table-cell>
          <table:table-cell office:value-type="string" calcext:value-type="string">
            <text:p>ハイケイ</text:p>
          </table:table-cell>
          <table:table-cell table:formula="of:=VLOOKUP([.K288];[$種類番号.$A$1:$種類番号.$B$4];2;0)" office:value-type="float" office:value="2" calcext:value-type="float">
            <text:p>2</text:p>
          </table:table-cell>
          <table:table-cell office:value-type="string" calcext:value-type="string">
            <text:p>紫</text:p>
          </table:table-cell>
          <table:table-cell table:formula="of:=VLOOKUP([.M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IF(ISNA([.$S288]);&quot;null&quot;;&quot;&quot;&quot;&quot;&amp;[.$S288]&amp;&quot;&quot;&quot;&quot;);[$JSON.$E$1];[.$U288];[$JSON.$F$1];IF(ISNA([.$W288]);&quot;null&quot;;&quot;&quot;&quot;&quot;&amp;[.$W288]&amp;&quot;&quot;&quot;&quot;);[$JSON.$G$1];[.$Y288];[$JSON.$H$1];[.$H288];[$JSON.$I$1];[.J288];[$JSON.$J$1];[.$L288];[$JSON.$K$1];[.$O288];[$JSON.$L$1];[.$N288];[$JSON.$M$1];[.$R288];[$JSON.$N$1];[.$T288];[$JSON.$O$1];IF(ISNA([.$V288]);&quot;null&quot;;[.$V288]);[$JSON.$P$1];[.$X288];[$JSON.$Q$1];[.$A288];[$JSON.$R$1];[.$B288];[$JSON.$S$1])" office:value-type="string" office:string-value="{&quot;id&quot;:&quot;3-59&quot;,&quot;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orderTable&quot;:287,&quot;orderDeck&quot;:247}," calcext:value-type="string">
            <text:p>{"id":"3-59","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G289];[$収録番号.$A$1:$収録番号.$B$9];2;0)" office:value-type="float" office:value="35" calcext:value-type="float">
            <text:p>35</text:p>
          </table:table-cell>
          <table:table-cell office:value-type="string" calcext:value-type="string">
            <text:p>N</text:p>
          </table:table-cell>
          <table:table-cell table:formula="of:=VLOOKUP([.I289];[$レアリティ番号.$A$1:$レアリティ番号.$B$4];2;0)" office:value-type="float" office:value="1" calcext:value-type="float">
            <text:p>1</text:p>
          </table:table-cell>
          <table:table-cell office:value-type="string" calcext:value-type="string">
            <text:p>ハイケイ</text:p>
          </table:table-cell>
          <table:table-cell table:formula="of:=VLOOKUP([.K289];[$種類番号.$A$1:$種類番号.$B$4];2;0)" office:value-type="float" office:value="2" calcext:value-type="float">
            <text:p>2</text:p>
          </table:table-cell>
          <table:table-cell office:value-type="string" calcext:value-type="string">
            <text:p>紫</text:p>
          </table:table-cell>
          <table:table-cell table:formula="of:=VLOOKUP([.M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IF(ISNA([.$S289]);&quot;null&quot;;&quot;&quot;&quot;&quot;&amp;[.$S289]&amp;&quot;&quot;&quot;&quot;);[$JSON.$E$1];[.$U289];[$JSON.$F$1];IF(ISNA([.$W289]);&quot;null&quot;;&quot;&quot;&quot;&quot;&amp;[.$W289]&amp;&quot;&quot;&quot;&quot;);[$JSON.$G$1];[.$Y289];[$JSON.$H$1];[.$H289];[$JSON.$I$1];[.J289];[$JSON.$J$1];[.$L289];[$JSON.$K$1];[.$O289];[$JSON.$L$1];[.$N289];[$JSON.$M$1];[.$R289];[$JSON.$N$1];[.$T289];[$JSON.$O$1];IF(ISNA([.$V289]);&quot;null&quot;;[.$V289]);[$JSON.$P$1];[.$X289];[$JSON.$Q$1];[.$A289];[$JSON.$R$1];[.$B289];[$JSON.$S$1])" office:value-type="string" office:string-value="{&quot;id&quot;:&quot;3-60&quot;,&quot;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orderTable&quot;:288,&quot;orderDeck&quot;:278}," calcext:value-type="string">
            <text:p>{"id":"3-60","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G290];[$収録番号.$A$1:$収録番号.$B$9];2;0)" office:value-type="float" office:value="35" calcext:value-type="float">
            <text:p>35</text:p>
          </table:table-cell>
          <table:table-cell office:value-type="string" calcext:value-type="string">
            <text:p>R</text:p>
          </table:table-cell>
          <table:table-cell table:formula="of:=VLOOKUP([.I290];[$レアリティ番号.$A$1:$レアリティ番号.$B$4];2;0)" office:value-type="float" office:value="2" calcext:value-type="float">
            <text:p>2</text:p>
          </table:table-cell>
          <table:table-cell office:value-type="string" calcext:value-type="string">
            <text:p>マホウ</text:p>
          </table:table-cell>
          <table:table-cell table:formula="of:=VLOOKUP([.K290];[$種類番号.$A$1:$種類番号.$B$4];2;0)" office:value-type="float" office:value="3" calcext:value-type="float">
            <text:p>3</text:p>
          </table:table-cell>
          <table:table-cell office:value-type="string" calcext:value-type="string">
            <text:p>赤</text:p>
          </table:table-cell>
          <table:table-cell table:formula="of:=VLOOKUP([.M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Q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IF(ISNA([.$S290]);&quot;null&quot;;&quot;&quot;&quot;&quot;&amp;[.$S290]&amp;&quot;&quot;&quot;&quot;);[$JSON.$E$1];[.$U290];[$JSON.$F$1];IF(ISNA([.$W290]);&quot;null&quot;;&quot;&quot;&quot;&quot;&amp;[.$W290]&amp;&quot;&quot;&quot;&quot;);[$JSON.$G$1];[.$Y290];[$JSON.$H$1];[.$H290];[$JSON.$I$1];[.J290];[$JSON.$J$1];[.$L290];[$JSON.$K$1];[.$O290];[$JSON.$L$1];[.$N290];[$JSON.$M$1];[.$R290];[$JSON.$N$1];[.$T290];[$JSON.$O$1];IF(ISNA([.$V290]);&quot;null&quot;;[.$V290]);[$JSON.$P$1];[.$X290];[$JSON.$Q$1];[.$A290];[$JSON.$R$1];[.$B290];[$JSON.$S$1])" office:value-type="string" office:string-value="{&quot;id&quot;:&quot;3-61&quot;,&quot;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orderTable&quot;:289,&quot;orderDeck&quot;:333}," calcext:value-type="string">
            <text:p>{"id":"3-61","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G291];[$収録番号.$A$1:$収録番号.$B$9];2;0)" office:value-type="float" office:value="35" calcext:value-type="float">
            <text:p>35</text:p>
          </table:table-cell>
          <table:table-cell office:value-type="string" calcext:value-type="string">
            <text:p>N</text:p>
          </table:table-cell>
          <table:table-cell table:formula="of:=VLOOKUP([.I291];[$レアリティ番号.$A$1:$レアリティ番号.$B$4];2;0)" office:value-type="float" office:value="1" calcext:value-type="float">
            <text:p>1</text:p>
          </table:table-cell>
          <table:table-cell office:value-type="string" calcext:value-type="string">
            <text:p>マホウ</text:p>
          </table:table-cell>
          <table:table-cell table:formula="of:=VLOOKUP([.K291];[$種類番号.$A$1:$種類番号.$B$4];2;0)" office:value-type="float" office:value="3" calcext:value-type="float">
            <text:p>3</text:p>
          </table:table-cell>
          <table:table-cell office:value-type="string" calcext:value-type="string">
            <text:p>赤</text:p>
          </table:table-cell>
          <table:table-cell table:formula="of:=VLOOKUP([.M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IF(ISNA([.$S291]);&quot;null&quot;;&quot;&quot;&quot;&quot;&amp;[.$S291]&amp;&quot;&quot;&quot;&quot;);[$JSON.$E$1];[.$U291];[$JSON.$F$1];IF(ISNA([.$W291]);&quot;null&quot;;&quot;&quot;&quot;&quot;&amp;[.$W291]&amp;&quot;&quot;&quot;&quot;);[$JSON.$G$1];[.$Y291];[$JSON.$H$1];[.$H291];[$JSON.$I$1];[.J291];[$JSON.$J$1];[.$L291];[$JSON.$K$1];[.$O291];[$JSON.$L$1];[.$N291];[$JSON.$M$1];[.$R291];[$JSON.$N$1];[.$T291];[$JSON.$O$1];IF(ISNA([.$V291]);&quot;null&quot;;[.$V291]);[$JSON.$P$1];[.$X291];[$JSON.$Q$1];[.$A291];[$JSON.$R$1];[.$B291];[$JSON.$S$1])" office:value-type="string" office:string-value="{&quot;id&quot;:&quot;3-62&quot;,&quot;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orderTable&quot;:290,&quot;orderDeck&quot;:293}," calcext:value-type="string">
            <text:p>{"id":"3-62","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G292];[$収録番号.$A$1:$収録番号.$B$9];2;0)" office:value-type="float" office:value="35" calcext:value-type="float">
            <text:p>35</text:p>
          </table:table-cell>
          <table:table-cell office:value-type="string" calcext:value-type="string">
            <text:p>R</text:p>
          </table:table-cell>
          <table:table-cell table:formula="of:=VLOOKUP([.I292];[$レアリティ番号.$A$1:$レアリティ番号.$B$4];2;0)" office:value-type="float" office:value="2" calcext:value-type="float">
            <text:p>2</text:p>
          </table:table-cell>
          <table:table-cell office:value-type="string" calcext:value-type="string">
            <text:p>マホウ</text:p>
          </table:table-cell>
          <table:table-cell table:formula="of:=VLOOKUP([.K292];[$種類番号.$A$1:$種類番号.$B$4];2;0)" office:value-type="float" office:value="3" calcext:value-type="float">
            <text:p>3</text:p>
          </table:table-cell>
          <table:table-cell office:value-type="string" calcext:value-type="string">
            <text:p>青</text:p>
          </table:table-cell>
          <table:table-cell table:formula="of:=VLOOKUP([.M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IF(ISNA([.$S292]);&quot;null&quot;;&quot;&quot;&quot;&quot;&amp;[.$S292]&amp;&quot;&quot;&quot;&quot;);[$JSON.$E$1];[.$U292];[$JSON.$F$1];IF(ISNA([.$W292]);&quot;null&quot;;&quot;&quot;&quot;&quot;&amp;[.$W292]&amp;&quot;&quot;&quot;&quot;);[$JSON.$G$1];[.$Y292];[$JSON.$H$1];[.$H292];[$JSON.$I$1];[.J292];[$JSON.$J$1];[.$L292];[$JSON.$K$1];[.$O292];[$JSON.$L$1];[.$N292];[$JSON.$M$1];[.$R292];[$JSON.$N$1];[.$T292];[$JSON.$O$1];IF(ISNA([.$V292]);&quot;null&quot;;[.$V292]);[$JSON.$P$1];[.$X292];[$JSON.$Q$1];[.$A292];[$JSON.$R$1];[.$B292];[$JSON.$S$1])" office:value-type="string" office:string-value="{&quot;id&quot;:&quot;3-63&quot;,&quot;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orderTable&quot;:291,&quot;orderDeck&quot;:336}," calcext:value-type="string">
            <text:p>{"id":"3-63","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G293];[$収録番号.$A$1:$収録番号.$B$9];2;0)" office:value-type="float" office:value="35" calcext:value-type="float">
            <text:p>35</text:p>
          </table:table-cell>
          <table:table-cell office:value-type="string" calcext:value-type="string">
            <text:p>N</text:p>
          </table:table-cell>
          <table:table-cell table:formula="of:=VLOOKUP([.I293];[$レアリティ番号.$A$1:$レアリティ番号.$B$4];2;0)" office:value-type="float" office:value="1" calcext:value-type="float">
            <text:p>1</text:p>
          </table:table-cell>
          <table:table-cell office:value-type="string" calcext:value-type="string">
            <text:p>マホウ</text:p>
          </table:table-cell>
          <table:table-cell table:formula="of:=VLOOKUP([.K293];[$種類番号.$A$1:$種類番号.$B$4];2;0)" office:value-type="float" office:value="3" calcext:value-type="float">
            <text:p>3</text:p>
          </table:table-cell>
          <table:table-cell office:value-type="string" calcext:value-type="string">
            <text:p>青</text:p>
          </table:table-cell>
          <table:table-cell table:formula="of:=VLOOKUP([.M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IF(ISNA([.$S293]);&quot;null&quot;;&quot;&quot;&quot;&quot;&amp;[.$S293]&amp;&quot;&quot;&quot;&quot;);[$JSON.$E$1];[.$U293];[$JSON.$F$1];IF(ISNA([.$W293]);&quot;null&quot;;&quot;&quot;&quot;&quot;&amp;[.$W293]&amp;&quot;&quot;&quot;&quot;);[$JSON.$G$1];[.$Y293];[$JSON.$H$1];[.$H293];[$JSON.$I$1];[.J293];[$JSON.$J$1];[.$L293];[$JSON.$K$1];[.$O293];[$JSON.$L$1];[.$N293];[$JSON.$M$1];[.$R293];[$JSON.$N$1];[.$T293];[$JSON.$O$1];IF(ISNA([.$V293]);&quot;null&quot;;[.$V293]);[$JSON.$P$1];[.$X293];[$JSON.$Q$1];[.$A293];[$JSON.$R$1];[.$B293];[$JSON.$S$1])" office:value-type="string" office:string-value="{&quot;id&quot;:&quot;3-64&quot;,&quot;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orderTable&quot;:292,&quot;orderDeck&quot;:297}," calcext:value-type="string">
            <text:p>{"id":"3-64","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G294];[$収録番号.$A$1:$収録番号.$B$9];2;0)" office:value-type="float" office:value="35" calcext:value-type="float">
            <text:p>35</text:p>
          </table:table-cell>
          <table:table-cell office:value-type="string" calcext:value-type="string">
            <text:p>N</text:p>
          </table:table-cell>
          <table:table-cell table:formula="of:=VLOOKUP([.I294];[$レアリティ番号.$A$1:$レアリティ番号.$B$4];2;0)" office:value-type="float" office:value="1" calcext:value-type="float">
            <text:p>1</text:p>
          </table:table-cell>
          <table:table-cell office:value-type="string" calcext:value-type="string">
            <text:p>マホウ</text:p>
          </table:table-cell>
          <table:table-cell table:formula="of:=VLOOKUP([.K294];[$種類番号.$A$1:$種類番号.$B$4];2;0)" office:value-type="float" office:value="3" calcext:value-type="float">
            <text:p>3</text:p>
          </table:table-cell>
          <table:table-cell office:value-type="string" calcext:value-type="string">
            <text:p>緑</text:p>
          </table:table-cell>
          <table:table-cell table:formula="of:=VLOOKUP([.M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IF(ISNA([.$S294]);&quot;null&quot;;&quot;&quot;&quot;&quot;&amp;[.$S294]&amp;&quot;&quot;&quot;&quot;);[$JSON.$E$1];[.$U294];[$JSON.$F$1];IF(ISNA([.$W294]);&quot;null&quot;;&quot;&quot;&quot;&quot;&amp;[.$W294]&amp;&quot;&quot;&quot;&quot;);[$JSON.$G$1];[.$Y294];[$JSON.$H$1];[.$H294];[$JSON.$I$1];[.J294];[$JSON.$J$1];[.$L294];[$JSON.$K$1];[.$O294];[$JSON.$L$1];[.$N294];[$JSON.$M$1];[.$R294];[$JSON.$N$1];[.$T294];[$JSON.$O$1];IF(ISNA([.$V294]);&quot;null&quot;;[.$V294]);[$JSON.$P$1];[.$X294];[$JSON.$Q$1];[.$A294];[$JSON.$R$1];[.$B294];[$JSON.$S$1])" office:value-type="string" office:string-value="{&quot;id&quot;:&quot;3-65&quot;,&quot;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orderTable&quot;:293,&quot;orderDeck&quot;:326}," calcext:value-type="string">
            <text:p>{"id":"3-65","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G295];[$収録番号.$A$1:$収録番号.$B$9];2;0)" office:value-type="float" office:value="35" calcext:value-type="float">
            <text:p>35</text:p>
          </table:table-cell>
          <table:table-cell office:value-type="string" calcext:value-type="string">
            <text:p>N</text:p>
          </table:table-cell>
          <table:table-cell table:formula="of:=VLOOKUP([.I295];[$レアリティ番号.$A$1:$レアリティ番号.$B$4];2;0)" office:value-type="float" office:value="1" calcext:value-type="float">
            <text:p>1</text:p>
          </table:table-cell>
          <table:table-cell office:value-type="string" calcext:value-type="string">
            <text:p>マホウ</text:p>
          </table:table-cell>
          <table:table-cell table:formula="of:=VLOOKUP([.K295];[$種類番号.$A$1:$種類番号.$B$4];2;0)" office:value-type="float" office:value="3" calcext:value-type="float">
            <text:p>3</text:p>
          </table:table-cell>
          <table:table-cell office:value-type="string" calcext:value-type="string">
            <text:p>緑</text:p>
          </table:table-cell>
          <table:table-cell table:formula="of:=VLOOKUP([.M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IF(ISNA([.$S295]);&quot;null&quot;;&quot;&quot;&quot;&quot;&amp;[.$S295]&amp;&quot;&quot;&quot;&quot;);[$JSON.$E$1];[.$U295];[$JSON.$F$1];IF(ISNA([.$W295]);&quot;null&quot;;&quot;&quot;&quot;&quot;&amp;[.$W295]&amp;&quot;&quot;&quot;&quot;);[$JSON.$G$1];[.$Y295];[$JSON.$H$1];[.$H295];[$JSON.$I$1];[.J295];[$JSON.$J$1];[.$L295];[$JSON.$K$1];[.$O295];[$JSON.$L$1];[.$N295];[$JSON.$M$1];[.$R295];[$JSON.$N$1];[.$T295];[$JSON.$O$1];IF(ISNA([.$V295]);&quot;null&quot;;[.$V295]);[$JSON.$P$1];[.$X295];[$JSON.$Q$1];[.$A295];[$JSON.$R$1];[.$B295];[$JSON.$S$1])" office:value-type="string" office:string-value="{&quot;id&quot;:&quot;3-66&quot;,&quot;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orderTable&quot;:294,&quot;orderDeck&quot;:298}," calcext:value-type="string">
            <text:p>{"id":"3-66","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G296];[$収録番号.$A$1:$収録番号.$B$9];2;0)" office:value-type="float" office:value="35" calcext:value-type="float">
            <text:p>35</text:p>
          </table:table-cell>
          <table:table-cell office:value-type="string" calcext:value-type="string">
            <text:p>N</text:p>
          </table:table-cell>
          <table:table-cell table:formula="of:=VLOOKUP([.I296];[$レアリティ番号.$A$1:$レアリティ番号.$B$4];2;0)" office:value-type="float" office:value="1" calcext:value-type="float">
            <text:p>1</text:p>
          </table:table-cell>
          <table:table-cell office:value-type="string" calcext:value-type="string">
            <text:p>マホウ</text:p>
          </table:table-cell>
          <table:table-cell table:formula="of:=VLOOKUP([.K296];[$種類番号.$A$1:$種類番号.$B$4];2;0)" office:value-type="float" office:value="3" calcext:value-type="float">
            <text:p>3</text:p>
          </table:table-cell>
          <table:table-cell office:value-type="string" calcext:value-type="string">
            <text:p>黄</text:p>
          </table:table-cell>
          <table:table-cell table:formula="of:=VLOOKUP([.M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IF(ISNA([.$S296]);&quot;null&quot;;&quot;&quot;&quot;&quot;&amp;[.$S296]&amp;&quot;&quot;&quot;&quot;);[$JSON.$E$1];[.$U296];[$JSON.$F$1];IF(ISNA([.$W296]);&quot;null&quot;;&quot;&quot;&quot;&quot;&amp;[.$W296]&amp;&quot;&quot;&quot;&quot;);[$JSON.$G$1];[.$Y296];[$JSON.$H$1];[.$H296];[$JSON.$I$1];[.J296];[$JSON.$J$1];[.$L296];[$JSON.$K$1];[.$O296];[$JSON.$L$1];[.$N296];[$JSON.$M$1];[.$R296];[$JSON.$N$1];[.$T296];[$JSON.$O$1];IF(ISNA([.$V296]);&quot;null&quot;;[.$V296]);[$JSON.$P$1];[.$X296];[$JSON.$Q$1];[.$A296];[$JSON.$R$1];[.$B296];[$JSON.$S$1])" office:value-type="string" office:string-value="{&quot;id&quot;:&quot;3-67&quot;,&quot;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orderTable&quot;:295,&quot;orderDeck&quot;:299}," calcext:value-type="string">
            <text:p>{"id":"3-67","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G297];[$収録番号.$A$1:$収録番号.$B$9];2;0)" office:value-type="float" office:value="35" calcext:value-type="float">
            <text:p>35</text:p>
          </table:table-cell>
          <table:table-cell office:value-type="string" calcext:value-type="string">
            <text:p>R</text:p>
          </table:table-cell>
          <table:table-cell table:formula="of:=VLOOKUP([.I297];[$レアリティ番号.$A$1:$レアリティ番号.$B$4];2;0)" office:value-type="float" office:value="2" calcext:value-type="float">
            <text:p>2</text:p>
          </table:table-cell>
          <table:table-cell office:value-type="string" calcext:value-type="string">
            <text:p>マホウ</text:p>
          </table:table-cell>
          <table:table-cell table:formula="of:=VLOOKUP([.K297];[$種類番号.$A$1:$種類番号.$B$4];2;0)" office:value-type="float" office:value="3" calcext:value-type="float">
            <text:p>3</text:p>
          </table:table-cell>
          <table:table-cell office:value-type="string" calcext:value-type="string">
            <text:p>黄</text:p>
          </table:table-cell>
          <table:table-cell table:formula="of:=VLOOKUP([.M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IF(ISNA([.$S297]);&quot;null&quot;;&quot;&quot;&quot;&quot;&amp;[.$S297]&amp;&quot;&quot;&quot;&quot;);[$JSON.$E$1];[.$U297];[$JSON.$F$1];IF(ISNA([.$W297]);&quot;null&quot;;&quot;&quot;&quot;&quot;&amp;[.$W297]&amp;&quot;&quot;&quot;&quot;);[$JSON.$G$1];[.$Y297];[$JSON.$H$1];[.$H297];[$JSON.$I$1];[.J297];[$JSON.$J$1];[.$L297];[$JSON.$K$1];[.$O297];[$JSON.$L$1];[.$N297];[$JSON.$M$1];[.$R297];[$JSON.$N$1];[.$T297];[$JSON.$O$1];IF(ISNA([.$V297]);&quot;null&quot;;[.$V297]);[$JSON.$P$1];[.$X297];[$JSON.$Q$1];[.$A297];[$JSON.$R$1];[.$B297];[$JSON.$S$1])" office:value-type="string" office:string-value="{&quot;id&quot;:&quot;3-68&quot;,&quot;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orderTable&quot;:296,&quot;orderDeck&quot;:301}," calcext:value-type="string">
            <text:p>{"id":"3-68","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G298];[$収録番号.$A$1:$収録番号.$B$9];2;0)" office:value-type="float" office:value="35" calcext:value-type="float">
            <text:p>35</text:p>
          </table:table-cell>
          <table:table-cell office:value-type="string" calcext:value-type="string">
            <text:p>N</text:p>
          </table:table-cell>
          <table:table-cell table:formula="of:=VLOOKUP([.I298];[$レアリティ番号.$A$1:$レアリティ番号.$B$4];2;0)" office:value-type="float" office:value="1" calcext:value-type="float">
            <text:p>1</text:p>
          </table:table-cell>
          <table:table-cell office:value-type="string" calcext:value-type="string">
            <text:p>マホウ</text:p>
          </table:table-cell>
          <table:table-cell table:formula="of:=VLOOKUP([.K298];[$種類番号.$A$1:$種類番号.$B$4];2;0)" office:value-type="float" office:value="3" calcext:value-type="float">
            <text:p>3</text:p>
          </table:table-cell>
          <table:table-cell office:value-type="string" calcext:value-type="string">
            <text:p>紫</text:p>
          </table:table-cell>
          <table:table-cell table:formula="of:=VLOOKUP([.M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IF(ISNA([.$S298]);&quot;null&quot;;&quot;&quot;&quot;&quot;&amp;[.$S298]&amp;&quot;&quot;&quot;&quot;);[$JSON.$E$1];[.$U298];[$JSON.$F$1];IF(ISNA([.$W298]);&quot;null&quot;;&quot;&quot;&quot;&quot;&amp;[.$W298]&amp;&quot;&quot;&quot;&quot;);[$JSON.$G$1];[.$Y298];[$JSON.$H$1];[.$H298];[$JSON.$I$1];[.J298];[$JSON.$J$1];[.$L298];[$JSON.$K$1];[.$O298];[$JSON.$L$1];[.$N298];[$JSON.$M$1];[.$R298];[$JSON.$N$1];[.$T298];[$JSON.$O$1];IF(ISNA([.$V298]);&quot;null&quot;;[.$V298]);[$JSON.$P$1];[.$X298];[$JSON.$Q$1];[.$A298];[$JSON.$R$1];[.$B298];[$JSON.$S$1])" office:value-type="string" office:string-value="{&quot;id&quot;:&quot;3-69&quot;,&quot;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orderTable&quot;:297,&quot;orderDeck&quot;:317}," calcext:value-type="string">
            <text:p>{"id":"3-69","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G299];[$収録番号.$A$1:$収録番号.$B$9];2;0)" office:value-type="float" office:value="35" calcext:value-type="float">
            <text:p>35</text:p>
          </table:table-cell>
          <table:table-cell office:value-type="string" calcext:value-type="string">
            <text:p>R</text:p>
          </table:table-cell>
          <table:table-cell table:formula="of:=VLOOKUP([.I299];[$レアリティ番号.$A$1:$レアリティ番号.$B$4];2;0)" office:value-type="float" office:value="2" calcext:value-type="float">
            <text:p>2</text:p>
          </table:table-cell>
          <table:table-cell office:value-type="string" calcext:value-type="string">
            <text:p>マホウ</text:p>
          </table:table-cell>
          <table:table-cell table:formula="of:=VLOOKUP([.K299];[$種類番号.$A$1:$種類番号.$B$4];2;0)" office:value-type="float" office:value="3" calcext:value-type="float">
            <text:p>3</text:p>
          </table:table-cell>
          <table:table-cell office:value-type="string" calcext:value-type="string">
            <text:p>紫</text:p>
          </table:table-cell>
          <table:table-cell table:formula="of:=VLOOKUP([.M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IF(ISNA([.$S299]);&quot;null&quot;;&quot;&quot;&quot;&quot;&amp;[.$S299]&amp;&quot;&quot;&quot;&quot;);[$JSON.$E$1];[.$U299];[$JSON.$F$1];IF(ISNA([.$W299]);&quot;null&quot;;&quot;&quot;&quot;&quot;&amp;[.$W299]&amp;&quot;&quot;&quot;&quot;);[$JSON.$G$1];[.$Y299];[$JSON.$H$1];[.$H299];[$JSON.$I$1];[.J299];[$JSON.$J$1];[.$L299];[$JSON.$K$1];[.$O299];[$JSON.$L$1];[.$N299];[$JSON.$M$1];[.$R299];[$JSON.$N$1];[.$T299];[$JSON.$O$1];IF(ISNA([.$V299]);&quot;null&quot;;[.$V299]);[$JSON.$P$1];[.$X299];[$JSON.$Q$1];[.$A299];[$JSON.$R$1];[.$B299];[$JSON.$S$1])" office:value-type="string" office:string-value="{&quot;id&quot;:&quot;3-70&quot;,&quot;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orderTable&quot;:298,&quot;orderDeck&quot;:302}," calcext:value-type="string">
            <text:p>{"id":"3-70","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G300];[$収録番号.$A$1:$収録番号.$B$9];2;0)" office:value-type="float" office:value="35" calcext:value-type="float">
            <text:p>35</text:p>
          </table:table-cell>
          <table:table-cell office:value-type="string" calcext:value-type="string">
            <text:p>N</text:p>
          </table:table-cell>
          <table:table-cell table:formula="of:=VLOOKUP([.I300];[$レアリティ番号.$A$1:$レアリティ番号.$B$4];2;0)" office:value-type="float" office:value="1" calcext:value-type="float">
            <text:p>1</text:p>
          </table:table-cell>
          <table:table-cell office:value-type="string" calcext:value-type="string">
            <text:p>マリョク</text:p>
          </table:table-cell>
          <table:table-cell table:formula="of:=VLOOKUP([.K300];[$種類番号.$A$1:$種類番号.$B$4];2;0)" office:value-type="float" office:value="4" calcext:value-type="float">
            <text:p>4</text:p>
          </table:table-cell>
          <table:table-cell office:value-type="string" calcext:value-type="string">
            <text:p>赤</text:p>
          </table:table-cell>
          <table:table-cell table:formula="of:=VLOOKUP([.M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IF(ISNA([.$S300]);&quot;null&quot;;&quot;&quot;&quot;&quot;&amp;[.$S300]&amp;&quot;&quot;&quot;&quot;);[$JSON.$E$1];[.$U300];[$JSON.$F$1];IF(ISNA([.$W300]);&quot;null&quot;;&quot;&quot;&quot;&quot;&amp;[.$W300]&amp;&quot;&quot;&quot;&quot;);[$JSON.$G$1];[.$Y300];[$JSON.$H$1];[.$H300];[$JSON.$I$1];[.J300];[$JSON.$J$1];[.$L300];[$JSON.$K$1];[.$O300];[$JSON.$L$1];[.$N300];[$JSON.$M$1];[.$R300];[$JSON.$N$1];[.$T300];[$JSON.$O$1];IF(ISNA([.$V300]);&quot;null&quot;;[.$V300]);[$JSON.$P$1];[.$X300];[$JSON.$Q$1];[.$A300];[$JSON.$R$1];[.$B300];[$JSON.$S$1])" office:value-type="string" office:string-value="{&quot;id&quot;:&quot;3-71&quot;,&quot;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orderTable&quot;:299,&quot;orderDeck&quot;:347}," calcext:value-type="string">
            <text:p>{"id":"3-71","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G301];[$収録番号.$A$1:$収録番号.$B$9];2;0)" office:value-type="float" office:value="35" calcext:value-type="float">
            <text:p>35</text:p>
          </table:table-cell>
          <table:table-cell office:value-type="string" calcext:value-type="string">
            <text:p>N</text:p>
          </table:table-cell>
          <table:table-cell table:formula="of:=VLOOKUP([.I301];[$レアリティ番号.$A$1:$レアリティ番号.$B$4];2;0)" office:value-type="float" office:value="1" calcext:value-type="float">
            <text:p>1</text:p>
          </table:table-cell>
          <table:table-cell office:value-type="string" calcext:value-type="string">
            <text:p>マリョク</text:p>
          </table:table-cell>
          <table:table-cell table:formula="of:=VLOOKUP([.K301];[$種類番号.$A$1:$種類番号.$B$4];2;0)" office:value-type="float" office:value="4" calcext:value-type="float">
            <text:p>4</text:p>
          </table:table-cell>
          <table:table-cell office:value-type="string" calcext:value-type="string">
            <text:p>青</text:p>
          </table:table-cell>
          <table:table-cell table:formula="of:=VLOOKUP([.M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IF(ISNA([.$S301]);&quot;null&quot;;&quot;&quot;&quot;&quot;&amp;[.$S301]&amp;&quot;&quot;&quot;&quot;);[$JSON.$E$1];[.$U301];[$JSON.$F$1];IF(ISNA([.$W301]);&quot;null&quot;;&quot;&quot;&quot;&quot;&amp;[.$W301]&amp;&quot;&quot;&quot;&quot;);[$JSON.$G$1];[.$Y301];[$JSON.$H$1];[.$H301];[$JSON.$I$1];[.J301];[$JSON.$J$1];[.$L301];[$JSON.$K$1];[.$O301];[$JSON.$L$1];[.$N301];[$JSON.$M$1];[.$R301];[$JSON.$N$1];[.$T301];[$JSON.$O$1];IF(ISNA([.$V301]);&quot;null&quot;;[.$V301]);[$JSON.$P$1];[.$X301];[$JSON.$Q$1];[.$A301];[$JSON.$R$1];[.$B301];[$JSON.$S$1])" office:value-type="string" office:string-value="{&quot;id&quot;:&quot;3-72&quot;,&quot;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orderTable&quot;:300,&quot;orderDeck&quot;:353}," calcext:value-type="string">
            <text:p>{"id":"3-72","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G302];[$収録番号.$A$1:$収録番号.$B$9];2;0)" office:value-type="float" office:value="35" calcext:value-type="float">
            <text:p>35</text:p>
          </table:table-cell>
          <table:table-cell office:value-type="string" calcext:value-type="string">
            <text:p>N</text:p>
          </table:table-cell>
          <table:table-cell table:formula="of:=VLOOKUP([.I302];[$レアリティ番号.$A$1:$レアリティ番号.$B$4];2;0)" office:value-type="float" office:value="1" calcext:value-type="float">
            <text:p>1</text:p>
          </table:table-cell>
          <table:table-cell office:value-type="string" calcext:value-type="string">
            <text:p>マリョク</text:p>
          </table:table-cell>
          <table:table-cell table:formula="of:=VLOOKUP([.K302];[$種類番号.$A$1:$種類番号.$B$4];2;0)" office:value-type="float" office:value="4" calcext:value-type="float">
            <text:p>4</text:p>
          </table:table-cell>
          <table:table-cell office:value-type="string" calcext:value-type="string">
            <text:p>緑</text:p>
          </table:table-cell>
          <table:table-cell table:formula="of:=VLOOKUP([.M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IF(ISNA([.$S302]);&quot;null&quot;;&quot;&quot;&quot;&quot;&amp;[.$S302]&amp;&quot;&quot;&quot;&quot;);[$JSON.$E$1];[.$U302];[$JSON.$F$1];IF(ISNA([.$W302]);&quot;null&quot;;&quot;&quot;&quot;&quot;&amp;[.$W302]&amp;&quot;&quot;&quot;&quot;);[$JSON.$G$1];[.$Y302];[$JSON.$H$1];[.$H302];[$JSON.$I$1];[.J302];[$JSON.$J$1];[.$L302];[$JSON.$K$1];[.$O302];[$JSON.$L$1];[.$N302];[$JSON.$M$1];[.$R302];[$JSON.$N$1];[.$T302];[$JSON.$O$1];IF(ISNA([.$V302]);&quot;null&quot;;[.$V302]);[$JSON.$P$1];[.$X302];[$JSON.$Q$1];[.$A302];[$JSON.$R$1];[.$B302];[$JSON.$S$1])" office:value-type="string" office:string-value="{&quot;id&quot;:&quot;3-73&quot;,&quot;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orderTable&quot;:301,&quot;orderDeck&quot;:359}," calcext:value-type="string">
            <text:p>{"id":"3-73","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G303];[$収録番号.$A$1:$収録番号.$B$9];2;0)" office:value-type="float" office:value="35" calcext:value-type="float">
            <text:p>35</text:p>
          </table:table-cell>
          <table:table-cell office:value-type="string" calcext:value-type="string">
            <text:p>N</text:p>
          </table:table-cell>
          <table:table-cell table:formula="of:=VLOOKUP([.I303];[$レアリティ番号.$A$1:$レアリティ番号.$B$4];2;0)" office:value-type="float" office:value="1" calcext:value-type="float">
            <text:p>1</text:p>
          </table:table-cell>
          <table:table-cell office:value-type="string" calcext:value-type="string">
            <text:p>マリョク</text:p>
          </table:table-cell>
          <table:table-cell table:formula="of:=VLOOKUP([.K303];[$種類番号.$A$1:$種類番号.$B$4];2;0)" office:value-type="float" office:value="4" calcext:value-type="float">
            <text:p>4</text:p>
          </table:table-cell>
          <table:table-cell office:value-type="string" calcext:value-type="string">
            <text:p>黄</text:p>
          </table:table-cell>
          <table:table-cell table:formula="of:=VLOOKUP([.M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IF(ISNA([.$S303]);&quot;null&quot;;&quot;&quot;&quot;&quot;&amp;[.$S303]&amp;&quot;&quot;&quot;&quot;);[$JSON.$E$1];[.$U303];[$JSON.$F$1];IF(ISNA([.$W303]);&quot;null&quot;;&quot;&quot;&quot;&quot;&amp;[.$W303]&amp;&quot;&quot;&quot;&quot;);[$JSON.$G$1];[.$Y303];[$JSON.$H$1];[.$H303];[$JSON.$I$1];[.J303];[$JSON.$J$1];[.$L303];[$JSON.$K$1];[.$O303];[$JSON.$L$1];[.$N303];[$JSON.$M$1];[.$R303];[$JSON.$N$1];[.$T303];[$JSON.$O$1];IF(ISNA([.$V303]);&quot;null&quot;;[.$V303]);[$JSON.$P$1];[.$X303];[$JSON.$Q$1];[.$A303];[$JSON.$R$1];[.$B303];[$JSON.$S$1])" office:value-type="string" office:string-value="{&quot;id&quot;:&quot;3-74&quot;,&quot;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orderTable&quot;:302,&quot;orderDeck&quot;:364}," calcext:value-type="string">
            <text:p>{"id":"3-74","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G304];[$収録番号.$A$1:$収録番号.$B$9];2;0)" office:value-type="float" office:value="35" calcext:value-type="float">
            <text:p>35</text:p>
          </table:table-cell>
          <table:table-cell office:value-type="string" calcext:value-type="string">
            <text:p>N</text:p>
          </table:table-cell>
          <table:table-cell table:formula="of:=VLOOKUP([.I304];[$レアリティ番号.$A$1:$レアリティ番号.$B$4];2;0)" office:value-type="float" office:value="1" calcext:value-type="float">
            <text:p>1</text:p>
          </table:table-cell>
          <table:table-cell office:value-type="string" calcext:value-type="string">
            <text:p>マリョク</text:p>
          </table:table-cell>
          <table:table-cell table:formula="of:=VLOOKUP([.K304];[$種類番号.$A$1:$種類番号.$B$4];2;0)" office:value-type="float" office:value="4" calcext:value-type="float">
            <text:p>4</text:p>
          </table:table-cell>
          <table:table-cell office:value-type="string" calcext:value-type="string">
            <text:p>紫</text:p>
          </table:table-cell>
          <table:table-cell table:formula="of:=VLOOKUP([.M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IF(ISNA([.$S304]);&quot;null&quot;;&quot;&quot;&quot;&quot;&amp;[.$S304]&amp;&quot;&quot;&quot;&quot;);[$JSON.$E$1];[.$U304];[$JSON.$F$1];IF(ISNA([.$W304]);&quot;null&quot;;&quot;&quot;&quot;&quot;&amp;[.$W304]&amp;&quot;&quot;&quot;&quot;);[$JSON.$G$1];[.$Y304];[$JSON.$H$1];[.$H304];[$JSON.$I$1];[.J304];[$JSON.$J$1];[.$L304];[$JSON.$K$1];[.$O304];[$JSON.$L$1];[.$N304];[$JSON.$M$1];[.$R304];[$JSON.$N$1];[.$T304];[$JSON.$O$1];IF(ISNA([.$V304]);&quot;null&quot;;[.$V304]);[$JSON.$P$1];[.$X304];[$JSON.$Q$1];[.$A304];[$JSON.$R$1];[.$B304];[$JSON.$S$1])" office:value-type="string" office:string-value="{&quot;id&quot;:&quot;3-75&quot;,&quot;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orderTable&quot;:303,&quot;orderDeck&quot;:369}," calcext:value-type="string">
            <text:p>{"id":"3-75","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G305];[$収録番号.$A$1:$収録番号.$B$9];2;0)" office:value-type="float" office:value="35" calcext:value-type="float">
            <text:p>35</text:p>
          </table:table-cell>
          <table:table-cell office:value-type="string" calcext:value-type="string">
            <text:p>N</text:p>
          </table:table-cell>
          <table:table-cell table:formula="of:=VLOOKUP([.I305];[$レアリティ番号.$A$1:$レアリティ番号.$B$4];2;0)" office:value-type="float" office:value="1" calcext:value-type="float">
            <text:p>1</text:p>
          </table:table-cell>
          <table:table-cell office:value-type="string" calcext:value-type="string">
            <text:p>マリョク</text:p>
          </table:table-cell>
          <table:table-cell table:formula="of:=VLOOKUP([.K305];[$種類番号.$A$1:$種類番号.$B$4];2;0)" office:value-type="float" office:value="4" calcext:value-type="float">
            <text:p>4</text:p>
          </table:table-cell>
          <table:table-cell office:value-type="string" calcext:value-type="string">
            <text:p>紫</text:p>
          </table:table-cell>
          <table:table-cell table:formula="of:=VLOOKUP([.M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IF(ISNA([.$S305]);&quot;null&quot;;&quot;&quot;&quot;&quot;&amp;[.$S305]&amp;&quot;&quot;&quot;&quot;);[$JSON.$E$1];[.$U305];[$JSON.$F$1];IF(ISNA([.$W305]);&quot;null&quot;;&quot;&quot;&quot;&quot;&amp;[.$W305]&amp;&quot;&quot;&quot;&quot;);[$JSON.$G$1];[.$Y305];[$JSON.$H$1];[.$H305];[$JSON.$I$1];[.J305];[$JSON.$J$1];[.$L305];[$JSON.$K$1];[.$O305];[$JSON.$L$1];[.$N305];[$JSON.$M$1];[.$R305];[$JSON.$N$1];[.$T305];[$JSON.$O$1];IF(ISNA([.$V305]);&quot;null&quot;;[.$V305]);[$JSON.$P$1];[.$X305];[$JSON.$Q$1];[.$A305];[$JSON.$R$1];[.$B305];[$JSON.$S$1])" office:value-type="string" office:string-value="{&quot;id&quot;:&quot;3-76&quot;,&quot;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orderTable&quot;:304,&quot;orderDeck&quot;:370}," calcext:value-type="string">
            <text:p>{"id":"3-76","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G306];[$収録番号.$A$1:$収録番号.$B$9];2;0)" office:value-type="float" office:value="35" calcext:value-type="float">
            <text:p>35</text:p>
          </table:table-cell>
          <table:table-cell office:value-type="string" calcext:value-type="string">
            <text:p>N</text:p>
          </table:table-cell>
          <table:table-cell table:formula="of:=VLOOKUP([.I306];[$レアリティ番号.$A$1:$レアリティ番号.$B$4];2;0)" office:value-type="float" office:value="1" calcext:value-type="float">
            <text:p>1</text:p>
          </table:table-cell>
          <table:table-cell office:value-type="string" calcext:value-type="string">
            <text:p>マリョク</text:p>
          </table:table-cell>
          <table:table-cell table:formula="of:=VLOOKUP([.K306];[$種類番号.$A$1:$種類番号.$B$4];2;0)" office:value-type="float" office:value="4" calcext:value-type="float">
            <text:p>4</text:p>
          </table:table-cell>
          <table:table-cell office:value-type="string" calcext:value-type="string">
            <text:p>無色</text:p>
          </table:table-cell>
          <table:table-cell table:formula="of:=VLOOKUP([.M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IF(ISNA([.$S306]);&quot;null&quot;;&quot;&quot;&quot;&quot;&amp;[.$S306]&amp;&quot;&quot;&quot;&quot;);[$JSON.$E$1];[.$U306];[$JSON.$F$1];IF(ISNA([.$W306]);&quot;null&quot;;&quot;&quot;&quot;&quot;&amp;[.$W306]&amp;&quot;&quot;&quot;&quot;);[$JSON.$G$1];[.$Y306];[$JSON.$H$1];[.$H306];[$JSON.$I$1];[.J306];[$JSON.$J$1];[.$L306];[$JSON.$K$1];[.$O306];[$JSON.$L$1];[.$N306];[$JSON.$M$1];[.$R306];[$JSON.$N$1];[.$T306];[$JSON.$O$1];IF(ISNA([.$V306]);&quot;null&quot;;[.$V306]);[$JSON.$P$1];[.$X306];[$JSON.$Q$1];[.$A306];[$JSON.$R$1];[.$B306];[$JSON.$S$1])" office:value-type="string" office:string-value="{&quot;id&quot;:&quot;3-77&quot;,&quot;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orderTable&quot;:305,&quot;orderDeck&quot;:342}," calcext:value-type="string">
            <text:p>{"id":"3-77","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G307];[$収録番号.$A$1:$収録番号.$B$9];2;0)" office:value-type="float" office:value="35" calcext:value-type="float">
            <text:p>35</text:p>
          </table:table-cell>
          <table:table-cell office:value-type="string" calcext:value-type="string">
            <text:p>N</text:p>
          </table:table-cell>
          <table:table-cell table:formula="of:=VLOOKUP([.I307];[$レアリティ番号.$A$1:$レアリティ番号.$B$4];2;0)" office:value-type="float" office:value="1" calcext:value-type="float">
            <text:p>1</text:p>
          </table:table-cell>
          <table:table-cell office:value-type="string" calcext:value-type="string">
            <text:p>マリョク</text:p>
          </table:table-cell>
          <table:table-cell table:formula="of:=VLOOKUP([.K307];[$種類番号.$A$1:$種類番号.$B$4];2;0)" office:value-type="float" office:value="4" calcext:value-type="float">
            <text:p>4</text:p>
          </table:table-cell>
          <table:table-cell office:value-type="string" calcext:value-type="string">
            <text:p>無色</text:p>
          </table:table-cell>
          <table:table-cell table:formula="of:=VLOOKUP([.M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IF(ISNA([.$S307]);&quot;null&quot;;&quot;&quot;&quot;&quot;&amp;[.$S307]&amp;&quot;&quot;&quot;&quot;);[$JSON.$E$1];[.$U307];[$JSON.$F$1];IF(ISNA([.$W307]);&quot;null&quot;;&quot;&quot;&quot;&quot;&amp;[.$W307]&amp;&quot;&quot;&quot;&quot;);[$JSON.$G$1];[.$Y307];[$JSON.$H$1];[.$H307];[$JSON.$I$1];[.J307];[$JSON.$J$1];[.$L307];[$JSON.$K$1];[.$O307];[$JSON.$L$1];[.$N307];[$JSON.$M$1];[.$R307];[$JSON.$N$1];[.$T307];[$JSON.$O$1];IF(ISNA([.$V307]);&quot;null&quot;;[.$V307]);[$JSON.$P$1];[.$X307];[$JSON.$Q$1];[.$A307];[$JSON.$R$1];[.$B307];[$JSON.$S$1])" office:value-type="string" office:string-value="{&quot;id&quot;:&quot;3-78&quot;,&quot;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orderTable&quot;:306,&quot;orderDeck&quot;:375}," calcext:value-type="string">
            <text:p>{"id":"3-78","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G308];[$収録番号.$A$1:$収録番号.$B$9];2;0)" office:value-type="float" office:value="35" calcext:value-type="float">
            <text:p>35</text:p>
          </table:table-cell>
          <table:table-cell office:value-type="string" calcext:value-type="string">
            <text:p>N</text:p>
          </table:table-cell>
          <table:table-cell table:formula="of:=VLOOKUP([.I308];[$レアリティ番号.$A$1:$レアリティ番号.$B$4];2;0)" office:value-type="float" office:value="1" calcext:value-type="float">
            <text:p>1</text:p>
          </table:table-cell>
          <table:table-cell office:value-type="string" calcext:value-type="string">
            <text:p>マリョク</text:p>
          </table:table-cell>
          <table:table-cell table:formula="of:=VLOOKUP([.K308];[$種類番号.$A$1:$種類番号.$B$4];2;0)" office:value-type="float" office:value="4" calcext:value-type="float">
            <text:p>4</text:p>
          </table:table-cell>
          <table:table-cell office:value-type="string" calcext:value-type="string">
            <text:p>無色</text:p>
          </table:table-cell>
          <table:table-cell table:formula="of:=VLOOKUP([.M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IF(ISNA([.$S308]);&quot;null&quot;;&quot;&quot;&quot;&quot;&amp;[.$S308]&amp;&quot;&quot;&quot;&quot;);[$JSON.$E$1];[.$U308];[$JSON.$F$1];IF(ISNA([.$W308]);&quot;null&quot;;&quot;&quot;&quot;&quot;&amp;[.$W308]&amp;&quot;&quot;&quot;&quot;);[$JSON.$G$1];[.$Y308];[$JSON.$H$1];[.$H308];[$JSON.$I$1];[.J308];[$JSON.$J$1];[.$L308];[$JSON.$K$1];[.$O308];[$JSON.$L$1];[.$N308];[$JSON.$M$1];[.$R308];[$JSON.$N$1];[.$T308];[$JSON.$O$1];IF(ISNA([.$V308]);&quot;null&quot;;[.$V308]);[$JSON.$P$1];[.$X308];[$JSON.$Q$1];[.$A308];[$JSON.$R$1];[.$B308];[$JSON.$S$1])" office:value-type="string" office:string-value="{&quot;id&quot;:&quot;3-79&quot;,&quot;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orderTable&quot;:307,&quot;orderDeck&quot;:376}," calcext:value-type="string">
            <text:p>{"id":"3-79","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G309];[$収録番号.$A$1:$収録番号.$B$9];2;0)" office:value-type="float" office:value="35" calcext:value-type="float">
            <text:p>35</text:p>
          </table:table-cell>
          <table:table-cell office:value-type="string" calcext:value-type="string">
            <text:p>R</text:p>
          </table:table-cell>
          <table:table-cell table:formula="of:=VLOOKUP([.I309];[$レアリティ番号.$A$1:$レアリティ番号.$B$4];2;0)" office:value-type="float" office:value="2" calcext:value-type="float">
            <text:p>2</text:p>
          </table:table-cell>
          <table:table-cell office:value-type="string" calcext:value-type="string">
            <text:p>マリョク</text:p>
          </table:table-cell>
          <table:table-cell table:formula="of:=VLOOKUP([.K309];[$種類番号.$A$1:$種類番号.$B$4];2;0)" office:value-type="float" office:value="4" calcext:value-type="float">
            <text:p>4</text:p>
          </table:table-cell>
          <table:table-cell office:value-type="string" calcext:value-type="string">
            <text:p>無色</text:p>
          </table:table-cell>
          <table:table-cell table:formula="of:=VLOOKUP([.M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IF(ISNA([.$S309]);&quot;null&quot;;&quot;&quot;&quot;&quot;&amp;[.$S309]&amp;&quot;&quot;&quot;&quot;);[$JSON.$E$1];[.$U309];[$JSON.$F$1];IF(ISNA([.$W309]);&quot;null&quot;;&quot;&quot;&quot;&quot;&amp;[.$W309]&amp;&quot;&quot;&quot;&quot;);[$JSON.$G$1];[.$Y309];[$JSON.$H$1];[.$H309];[$JSON.$I$1];[.J309];[$JSON.$J$1];[.$L309];[$JSON.$K$1];[.$O309];[$JSON.$L$1];[.$N309];[$JSON.$M$1];[.$R309];[$JSON.$N$1];[.$T309];[$JSON.$O$1];IF(ISNA([.$V309]);&quot;null&quot;;[.$V309]);[$JSON.$P$1];[.$X309];[$JSON.$Q$1];[.$A309];[$JSON.$R$1];[.$B309];[$JSON.$S$1])" office:value-type="string" office:string-value="{&quot;id&quot;:&quot;3-80&quot;,&quot;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orderTable&quot;:308,&quot;orderDeck&quot;:390}," calcext:value-type="string">
            <text:p>{"id":"3-80","name":"オブシディアン","kana":"おぶしでぃあん","traitText":null,"ruleText":"","legacyText":"魔力化","imageUrl":"https://one-draw.jp/ijinden/cardlist/003/card/03_080.png","expansion":35,"rarity":2,"type":4,"level":3,"color":64,"term":0,"trait":0,"power":null,"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1</text:p>
          </table:table-cell>
          <table:table-cell office:value-type="float" office:value="1" calcext:value-type="float">
            <text:p>1</text:p>
          </table:table-cell>
          <table:table-cell office:value-type="string"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G310];[$収録番号.$A$1:$収録番号.$B$9];2;0)" office:value-type="float" office:value="45" calcext:value-type="float">
            <text:p>45</text:p>
          </table:table-cell>
          <table:table-cell office:value-type="string" calcext:value-type="string">
            <text:p>SR</text:p>
          </table:table-cell>
          <table:table-cell table:formula="of:=VLOOKUP([.I310];[$レアリティ番号.$A$1:$レアリティ番号.$B$4];2;0)" office:value-type="float" office:value="4" calcext:value-type="float">
            <text:p>4</text:p>
          </table:table-cell>
          <table:table-cell office:value-type="string" calcext:value-type="string">
            <text:p>イジン</text:p>
          </table:table-cell>
          <table:table-cell table:formula="of:=VLOOKUP([.K310];[$種類番号.$A$1:$種類番号.$B$4];2;0)" office:value-type="float" office:value="1" calcext:value-type="float">
            <text:p>1</text:p>
          </table:table-cell>
          <table:table-cell office:value-type="string" calcext:value-type="string">
            <text:p>赤</text:p>
          </table:table-cell>
          <table:table-cell table:formula="of:=VLOOKUP([.M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office:value-type="float" office:value="2000" calcext:value-type="float">
            <text:p>2000</text:p>
          </table:table-cell>
          <table:table-cell table:style-name="ce8" table:formula="of:=NA()" office:value-type="string" office:string-value="" calcext:value-type="error">
            <text:p>#N/A</text:p>
          </table:table-cell>
          <table:table-cell table:formula="of:=IFERROR(VLOOKUP([.$W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IF(ISNA([.$S310]);&quot;null&quot;;&quot;&quot;&quot;&quot;&amp;[.$S310]&amp;&quot;&quot;&quot;&quot;);[$JSON.$E$1];[.$U310];[$JSON.$F$1];IF(ISNA([.$W310]);&quot;null&quot;;&quot;&quot;&quot;&quot;&amp;[.$W310]&amp;&quot;&quot;&quot;&quot;);[$JSON.$G$1];[.$Y310];[$JSON.$H$1];[.$H310];[$JSON.$I$1];[.J310];[$JSON.$J$1];[.$L310];[$JSON.$K$1];[.$O310];[$JSON.$L$1];[.$N310];[$JSON.$M$1];[.$R310];[$JSON.$N$1];[.$T310];[$JSON.$O$1];IF(ISNA([.$V310]);&quot;null&quot;;[.$V310]);[$JSON.$P$1];[.$X310];[$JSON.$Q$1];[.$A310];[$JSON.$R$1];[.$B310];[$JSON.$S$1])" office:value-type="string" office:string-value="{&quot;id&quot;:&quot;4-1&quot;,&quot;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orderTable&quot;:310,&quot;orderDeck&quot;:184}," calcext:value-type="string">
            <text:p>{"id":"4-1","name":"西郷隆盛","kana":"さいごうたかもり","traitText":null,"ruleText":"モータル¶イジンが相手の戦場にいる間「アタック+3000」を得る。","legacyText":null,"imageUrl":"https://one-draw.jp/ijinden/cardlist/004/card/04_001.png","expansion":45,"rarity":4,"type":1,"level":6,"color":1,"term":0,"trait":0,"power":200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2</text:p>
          </table:table-cell>
          <table:table-cell office:value-type="float" office:value="2" calcext:value-type="float">
            <text:p>2</text:p>
          </table:table-cell>
          <table:table-cell office:value-type="string"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G311];[$収録番号.$A$1:$収録番号.$B$9];2;0)" office:value-type="float" office:value="45" calcext:value-type="float">
            <text:p>45</text:p>
          </table:table-cell>
          <table:table-cell office:value-type="string" calcext:value-type="string">
            <text:p>SR</text:p>
          </table:table-cell>
          <table:table-cell table:formula="of:=VLOOKUP([.I311];[$レアリティ番号.$A$1:$レアリティ番号.$B$4];2;0)" office:value-type="float" office:value="4" calcext:value-type="float">
            <text:p>4</text:p>
          </table:table-cell>
          <table:table-cell office:value-type="string" calcext:value-type="string">
            <text:p>イジン</text:p>
          </table:table-cell>
          <table:table-cell table:formula="of:=VLOOKUP([.K311];[$種類番号.$A$1:$種類番号.$B$4];2;0)" office:value-type="float" office:value="1" calcext:value-type="float">
            <text:p>1</text:p>
          </table:table-cell>
          <table:table-cell office:value-type="string" calcext:value-type="string">
            <text:p>赤</text:p>
          </table:table-cell>
          <table:table-cell table:formula="of:=VLOOKUP([.M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office:value-type="float" office:value="3000" calcext:value-type="float">
            <text:p>3000</text:p>
          </table:table-cell>
          <table:table-cell table:style-name="ce8" office:value-type="string" calcext:value-type="string">
            <text:p>魔力化</text:p>
          </table:table-cell>
          <table:table-cell table:formula="of:=IFERROR(VLOOKUP([.$W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IF(ISNA([.$S311]);&quot;null&quot;;&quot;&quot;&quot;&quot;&amp;[.$S311]&amp;&quot;&quot;&quot;&quot;);[$JSON.$E$1];[.$U311];[$JSON.$F$1];IF(ISNA([.$W311]);&quot;null&quot;;&quot;&quot;&quot;&quot;&amp;[.$W311]&amp;&quot;&quot;&quot;&quot;);[$JSON.$G$1];[.$Y311];[$JSON.$H$1];[.$H311];[$JSON.$I$1];[.J311];[$JSON.$J$1];[.$L311];[$JSON.$K$1];[.$O311];[$JSON.$L$1];[.$N311];[$JSON.$M$1];[.$R311];[$JSON.$N$1];[.$T311];[$JSON.$O$1];IF(ISNA([.$V311]);&quot;null&quot;;[.$V311]);[$JSON.$P$1];[.$X311];[$JSON.$Q$1];[.$A311];[$JSON.$R$1];[.$B311];[$JSON.$S$1])" office:value-type="string" office:string-value="{&quot;id&quot;:&quot;4-2&quot;,&quot;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orderTable&quot;:311,&quot;orderDeck&quot;:73}," calcext:value-type="string">
            <text:p>{"id":"4-2","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3</text:p>
          </table:table-cell>
          <table:table-cell office:value-type="float" office:value="3" calcext:value-type="float">
            <text:p>3</text:p>
          </table:table-cell>
          <table:table-cell office:value-type="string"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G312];[$収録番号.$A$1:$収録番号.$B$9];2;0)" office:value-type="float" office:value="45" calcext:value-type="float">
            <text:p>45</text:p>
          </table:table-cell>
          <table:table-cell office:value-type="string" calcext:value-type="string">
            <text:p>SR</text:p>
          </table:table-cell>
          <table:table-cell table:formula="of:=VLOOKUP([.I312];[$レアリティ番号.$A$1:$レアリティ番号.$B$4];2;0)" office:value-type="float" office:value="4" calcext:value-type="float">
            <text:p>4</text:p>
          </table:table-cell>
          <table:table-cell office:value-type="string" calcext:value-type="string">
            <text:p>イジン</text:p>
          </table:table-cell>
          <table:table-cell table:formula="of:=VLOOKUP([.K312];[$種類番号.$A$1:$種類番号.$B$4];2;0)" office:value-type="float" office:value="1" calcext:value-type="float">
            <text:p>1</text:p>
          </table:table-cell>
          <table:table-cell office:value-type="string" calcext:value-type="string">
            <text:p>青</text:p>
          </table:table-cell>
          <table:table-cell table:formula="of:=VLOOKUP([.M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IF(ISNA([.$S312]);&quot;null&quot;;&quot;&quot;&quot;&quot;&amp;[.$S312]&amp;&quot;&quot;&quot;&quot;);[$JSON.$E$1];[.$U312];[$JSON.$F$1];IF(ISNA([.$W312]);&quot;null&quot;;&quot;&quot;&quot;&quot;&amp;[.$W312]&amp;&quot;&quot;&quot;&quot;);[$JSON.$G$1];[.$Y312];[$JSON.$H$1];[.$H312];[$JSON.$I$1];[.J312];[$JSON.$J$1];[.$L312];[$JSON.$K$1];[.$O312];[$JSON.$L$1];[.$N312];[$JSON.$M$1];[.$R312];[$JSON.$N$1];[.$T312];[$JSON.$O$1];IF(ISNA([.$V312]);&quot;null&quot;;[.$V312]);[$JSON.$P$1];[.$X312];[$JSON.$Q$1];[.$A312];[$JSON.$R$1];[.$B312];[$JSON.$S$1])" office:value-type="string" office:string-value="{&quot;id&quot;:&quot;4-3&quot;,&quot;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orderTable&quot;:312,&quot;orderDeck&quot;:122}," calcext:value-type="string">
            <text:p>{"id":"4-3","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4</text:p>
          </table:table-cell>
          <table:table-cell office:value-type="float" office:value="4" calcext:value-type="float">
            <text:p>4</text:p>
          </table:table-cell>
          <table:table-cell office:value-type="string"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G313];[$収録番号.$A$1:$収録番号.$B$9];2;0)" office:value-type="float" office:value="45" calcext:value-type="float">
            <text:p>45</text:p>
          </table:table-cell>
          <table:table-cell office:value-type="string" calcext:value-type="string">
            <text:p>SR</text:p>
          </table:table-cell>
          <table:table-cell table:formula="of:=VLOOKUP([.I313];[$レアリティ番号.$A$1:$レアリティ番号.$B$4];2;0)" office:value-type="float" office:value="4" calcext:value-type="float">
            <text:p>4</text:p>
          </table:table-cell>
          <table:table-cell office:value-type="string" calcext:value-type="string">
            <text:p>イジン</text:p>
          </table:table-cell>
          <table:table-cell table:formula="of:=VLOOKUP([.K313];[$種類番号.$A$1:$種類番号.$B$4];2;0)" office:value-type="float" office:value="1" calcext:value-type="float">
            <text:p>1</text:p>
          </table:table-cell>
          <table:table-cell office:value-type="string" calcext:value-type="string">
            <text:p>青</text:p>
          </table:table-cell>
          <table:table-cell table:formula="of:=VLOOKUP([.M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IF(ISNA([.$S313]);&quot;null&quot;;&quot;&quot;&quot;&quot;&amp;[.$S313]&amp;&quot;&quot;&quot;&quot;);[$JSON.$E$1];[.$U313];[$JSON.$F$1];IF(ISNA([.$W313]);&quot;null&quot;;&quot;&quot;&quot;&quot;&amp;[.$W313]&amp;&quot;&quot;&quot;&quot;);[$JSON.$G$1];[.$Y313];[$JSON.$H$1];[.$H313];[$JSON.$I$1];[.J313];[$JSON.$J$1];[.$L313];[$JSON.$K$1];[.$O313];[$JSON.$L$1];[.$N313];[$JSON.$M$1];[.$R313];[$JSON.$N$1];[.$T313];[$JSON.$O$1];IF(ISNA([.$V313]);&quot;null&quot;;[.$V313]);[$JSON.$P$1];[.$X313];[$JSON.$Q$1];[.$A313];[$JSON.$R$1];[.$B313];[$JSON.$S$1])" office:value-type="string" office:string-value="{&quot;id&quot;:&quot;4-4&quot;,&quot;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orderTable&quot;:313,&quot;orderDeck&quot;:207}," calcext:value-type="string">
            <text:p>{"id":"4-4","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5</text:p>
          </table:table-cell>
          <table:table-cell office:value-type="float" office:value="5" calcext:value-type="float">
            <text:p>5</text:p>
          </table:table-cell>
          <table:table-cell office:value-type="string"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G314];[$収録番号.$A$1:$収録番号.$B$9];2;0)" office:value-type="float" office:value="45" calcext:value-type="float">
            <text:p>45</text:p>
          </table:table-cell>
          <table:table-cell office:value-type="string" calcext:value-type="string">
            <text:p>SR</text:p>
          </table:table-cell>
          <table:table-cell table:formula="of:=VLOOKUP([.I314];[$レアリティ番号.$A$1:$レアリティ番号.$B$4];2;0)" office:value-type="float" office:value="4" calcext:value-type="float">
            <text:p>4</text:p>
          </table:table-cell>
          <table:table-cell office:value-type="string" calcext:value-type="string">
            <text:p>イジン</text:p>
          </table:table-cell>
          <table:table-cell table:formula="of:=VLOOKUP([.K314];[$種類番号.$A$1:$種類番号.$B$4];2;0)" office:value-type="float" office:value="1" calcext:value-type="float">
            <text:p>1</text:p>
          </table:table-cell>
          <table:table-cell office:value-type="string" calcext:value-type="string">
            <text:p>緑</text:p>
          </table:table-cell>
          <table:table-cell table:formula="of:=VLOOKUP([.M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office:value-type="float" office:value="2000" calcext:value-type="float">
            <text:p>2000</text:p>
          </table:table-cell>
          <table:table-cell table:style-name="ce8" office:value-type="string" calcext:value-type="string">
            <text:p>反魂</text:p>
          </table:table-cell>
          <table:table-cell table:formula="of:=IFERROR(VLOOKUP([.$W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IF(ISNA([.$S314]);&quot;null&quot;;&quot;&quot;&quot;&quot;&amp;[.$S314]&amp;&quot;&quot;&quot;&quot;);[$JSON.$E$1];[.$U314];[$JSON.$F$1];IF(ISNA([.$W314]);&quot;null&quot;;&quot;&quot;&quot;&quot;&amp;[.$W314]&amp;&quot;&quot;&quot;&quot;);[$JSON.$G$1];[.$Y314];[$JSON.$H$1];[.$H314];[$JSON.$I$1];[.J314];[$JSON.$J$1];[.$L314];[$JSON.$K$1];[.$O314];[$JSON.$L$1];[.$N314];[$JSON.$M$1];[.$R314];[$JSON.$N$1];[.$T314];[$JSON.$O$1];IF(ISNA([.$V314]);&quot;null&quot;;[.$V314]);[$JSON.$P$1];[.$X314];[$JSON.$Q$1];[.$A314];[$JSON.$R$1];[.$B314];[$JSON.$S$1])" office:value-type="string" office:string-value="{&quot;id&quot;:&quot;4-5&quot;,&quot;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orderTable&quot;:314,&quot;orderDeck&quot;:50}," calcext:value-type="string">
            <text:p>{"id":"4-5","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6</text:p>
          </table:table-cell>
          <table:table-cell office:value-type="float" office:value="6" calcext:value-type="float">
            <text:p>6</text:p>
          </table:table-cell>
          <table:table-cell office:value-type="string"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G315];[$収録番号.$A$1:$収録番号.$B$9];2;0)" office:value-type="float" office:value="45" calcext:value-type="float">
            <text:p>45</text:p>
          </table:table-cell>
          <table:table-cell office:value-type="string" calcext:value-type="string">
            <text:p>SR</text:p>
          </table:table-cell>
          <table:table-cell table:formula="of:=VLOOKUP([.I315];[$レアリティ番号.$A$1:$レアリティ番号.$B$4];2;0)" office:value-type="float" office:value="4" calcext:value-type="float">
            <text:p>4</text:p>
          </table:table-cell>
          <table:table-cell office:value-type="string" calcext:value-type="string">
            <text:p>イジン</text:p>
          </table:table-cell>
          <table:table-cell table:formula="of:=VLOOKUP([.K315];[$種類番号.$A$1:$種類番号.$B$4];2;0)" office:value-type="float" office:value="1" calcext:value-type="float">
            <text:p>1</text:p>
          </table:table-cell>
          <table:table-cell office:value-type="string" calcext:value-type="string">
            <text:p>緑</text:p>
          </table:table-cell>
          <table:table-cell table:formula="of:=VLOOKUP([.M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IF(ISNA([.$S315]);&quot;null&quot;;&quot;&quot;&quot;&quot;&amp;[.$S315]&amp;&quot;&quot;&quot;&quot;);[$JSON.$E$1];[.$U315];[$JSON.$F$1];IF(ISNA([.$W315]);&quot;null&quot;;&quot;&quot;&quot;&quot;&amp;[.$W315]&amp;&quot;&quot;&quot;&quot;);[$JSON.$G$1];[.$Y315];[$JSON.$H$1];[.$H315];[$JSON.$I$1];[.J315];[$JSON.$J$1];[.$L315];[$JSON.$K$1];[.$O315];[$JSON.$L$1];[.$N315];[$JSON.$M$1];[.$R315];[$JSON.$N$1];[.$T315];[$JSON.$O$1];IF(ISNA([.$V315]);&quot;null&quot;;[.$V315]);[$JSON.$P$1];[.$X315];[$JSON.$Q$1];[.$A315];[$JSON.$R$1];[.$B315];[$JSON.$S$1])" office:value-type="string" office:string-value="{&quot;id&quot;:&quot;4-6&quot;,&quot;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orderTable&quot;:315,&quot;orderDeck&quot;:130}," calcext:value-type="string">
            <text:p>{"id":"4-6","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7</text:p>
          </table:table-cell>
          <table:table-cell office:value-type="float" office:value="7" calcext:value-type="float">
            <text:p>7</text:p>
          </table:table-cell>
          <table:table-cell office:value-type="string"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G316];[$収録番号.$A$1:$収録番号.$B$9];2;0)" office:value-type="float" office:value="45" calcext:value-type="float">
            <text:p>45</text:p>
          </table:table-cell>
          <table:table-cell office:value-type="string" calcext:value-type="string">
            <text:p>SR</text:p>
          </table:table-cell>
          <table:table-cell table:formula="of:=VLOOKUP([.I316];[$レアリティ番号.$A$1:$レアリティ番号.$B$4];2;0)" office:value-type="float" office:value="4" calcext:value-type="float">
            <text:p>4</text:p>
          </table:table-cell>
          <table:table-cell office:value-type="string" calcext:value-type="string">
            <text:p>イジン</text:p>
          </table:table-cell>
          <table:table-cell table:formula="of:=VLOOKUP([.K316];[$種類番号.$A$1:$種類番号.$B$4];2;0)" office:value-type="float" office:value="1" calcext:value-type="float">
            <text:p>1</text:p>
          </table:table-cell>
          <table:table-cell office:value-type="string" calcext:value-type="string">
            <text:p>黄</text:p>
          </table:table-cell>
          <table:table-cell table:formula="of:=VLOOKUP([.M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office:value-type="float" office:value="1000" calcext:value-type="float">
            <text:p>1000</text:p>
          </table:table-cell>
          <table:table-cell table:style-name="ce8" office:value-type="string" calcext:value-type="string">
            <text:p>魔力化</text:p>
          </table:table-cell>
          <table:table-cell table:formula="of:=IFERROR(VLOOKUP([.$W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IF(ISNA([.$S316]);&quot;null&quot;;&quot;&quot;&quot;&quot;&amp;[.$S316]&amp;&quot;&quot;&quot;&quot;);[$JSON.$E$1];[.$U316];[$JSON.$F$1];IF(ISNA([.$W316]);&quot;null&quot;;&quot;&quot;&quot;&quot;&amp;[.$W316]&amp;&quot;&quot;&quot;&quot;);[$JSON.$G$1];[.$Y316];[$JSON.$H$1];[.$H316];[$JSON.$I$1];[.J316];[$JSON.$J$1];[.$L316];[$JSON.$K$1];[.$O316];[$JSON.$L$1];[.$N316];[$JSON.$M$1];[.$R316];[$JSON.$N$1];[.$T316];[$JSON.$O$1];IF(ISNA([.$V316]);&quot;null&quot;;[.$V316]);[$JSON.$P$1];[.$X316];[$JSON.$Q$1];[.$A316];[$JSON.$R$1];[.$B316];[$JSON.$S$1])" office:value-type="string" office:string-value="{&quot;id&quot;:&quot;4-7&quot;,&quot;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orderTable&quot;:316,&quot;orderDeck&quot;:137}," calcext:value-type="string">
            <text:p>{"id":"4-7","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8</text:p>
          </table:table-cell>
          <table:table-cell office:value-type="float" office:value="8" calcext:value-type="float">
            <text:p>8</text:p>
          </table:table-cell>
          <table:table-cell office:value-type="string"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G317];[$収録番号.$A$1:$収録番号.$B$9];2;0)" office:value-type="float" office:value="45" calcext:value-type="float">
            <text:p>45</text:p>
          </table:table-cell>
          <table:table-cell office:value-type="string" calcext:value-type="string">
            <text:p>SR</text:p>
          </table:table-cell>
          <table:table-cell table:formula="of:=VLOOKUP([.I317];[$レアリティ番号.$A$1:$レアリティ番号.$B$4];2;0)" office:value-type="float" office:value="4" calcext:value-type="float">
            <text:p>4</text:p>
          </table:table-cell>
          <table:table-cell office:value-type="string" calcext:value-type="string">
            <text:p>イジン</text:p>
          </table:table-cell>
          <table:table-cell table:formula="of:=VLOOKUP([.K317];[$種類番号.$A$1:$種類番号.$B$4];2;0)" office:value-type="float" office:value="1" calcext:value-type="float">
            <text:p>1</text:p>
          </table:table-cell>
          <table:table-cell office:value-type="string" calcext:value-type="string">
            <text:p>黄</text:p>
          </table:table-cell>
          <table:table-cell table:formula="of:=VLOOKUP([.M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office:value-type="float" office:value="6000" calcext:value-type="float">
            <text:p>6000</text:p>
          </table:table-cell>
          <table:table-cell table:style-name="ce8" office:value-type="string" calcext:value-type="string">
            <text:p>魔力化</text:p>
          </table:table-cell>
          <table:table-cell table:formula="of:=IFERROR(VLOOKUP([.$W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IF(ISNA([.$S317]);&quot;null&quot;;&quot;&quot;&quot;&quot;&amp;[.$S317]&amp;&quot;&quot;&quot;&quot;);[$JSON.$E$1];[.$U317];[$JSON.$F$1];IF(ISNA([.$W317]);&quot;null&quot;;&quot;&quot;&quot;&quot;&amp;[.$W317]&amp;&quot;&quot;&quot;&quot;);[$JSON.$G$1];[.$Y317];[$JSON.$H$1];[.$H317];[$JSON.$I$1];[.J317];[$JSON.$J$1];[.$L317];[$JSON.$K$1];[.$O317];[$JSON.$L$1];[.$N317];[$JSON.$M$1];[.$R317];[$JSON.$N$1];[.$T317];[$JSON.$O$1];IF(ISNA([.$V317]);&quot;null&quot;;[.$V317]);[$JSON.$P$1];[.$X317];[$JSON.$Q$1];[.$A317];[$JSON.$R$1];[.$B317];[$JSON.$S$1])" office:value-type="string" office:string-value="{&quot;id&quot;:&quot;4-8&quot;,&quot;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orderTable&quot;:317,&quot;orderDeck&quot;:217}," calcext:value-type="string">
            <text:p>{"id":"4-8","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9</text:p>
          </table:table-cell>
          <table:table-cell office:value-type="float" office:value="9" calcext:value-type="float">
            <text:p>9</text:p>
          </table:table-cell>
          <table:table-cell office:value-type="string"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G318];[$収録番号.$A$1:$収録番号.$B$9];2;0)" office:value-type="float" office:value="45" calcext:value-type="float">
            <text:p>45</text:p>
          </table:table-cell>
          <table:table-cell office:value-type="string" calcext:value-type="string">
            <text:p>SR</text:p>
          </table:table-cell>
          <table:table-cell table:formula="of:=VLOOKUP([.I318];[$レアリティ番号.$A$1:$レアリティ番号.$B$4];2;0)" office:value-type="float" office:value="4" calcext:value-type="float">
            <text:p>4</text:p>
          </table:table-cell>
          <table:table-cell office:value-type="string" calcext:value-type="string">
            <text:p>イジン</text:p>
          </table:table-cell>
          <table:table-cell table:formula="of:=VLOOKUP([.K318];[$種類番号.$A$1:$種類番号.$B$4];2;0)" office:value-type="float" office:value="1" calcext:value-type="float">
            <text:p>1</text:p>
          </table:table-cell>
          <table:table-cell office:value-type="string" calcext:value-type="string">
            <text:p>紫</text:p>
          </table:table-cell>
          <table:table-cell table:formula="of:=VLOOKUP([.M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IF(ISNA([.$S318]);&quot;null&quot;;&quot;&quot;&quot;&quot;&amp;[.$S318]&amp;&quot;&quot;&quot;&quot;);[$JSON.$E$1];[.$U318];[$JSON.$F$1];IF(ISNA([.$W318]);&quot;null&quot;;&quot;&quot;&quot;&quot;&amp;[.$W318]&amp;&quot;&quot;&quot;&quot;);[$JSON.$G$1];[.$Y318];[$JSON.$H$1];[.$H318];[$JSON.$I$1];[.J318];[$JSON.$J$1];[.$L318];[$JSON.$K$1];[.$O318];[$JSON.$L$1];[.$N318];[$JSON.$M$1];[.$R318];[$JSON.$N$1];[.$T318];[$JSON.$O$1];IF(ISNA([.$V318]);&quot;null&quot;;[.$V318]);[$JSON.$P$1];[.$X318];[$JSON.$Q$1];[.$A318];[$JSON.$R$1];[.$B318];[$JSON.$S$1])" office:value-type="string" office:string-value="{&quot;id&quot;:&quot;4-9&quot;,&quot;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orderTable&quot;:318,&quot;orderDeck&quot;:178}," calcext:value-type="string">
            <text:p>{"id":"4-9","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G319];[$収録番号.$A$1:$収録番号.$B$9];2;0)" office:value-type="float" office:value="45" calcext:value-type="float">
            <text:p>45</text:p>
          </table:table-cell>
          <table:table-cell office:value-type="string" calcext:value-type="string">
            <text:p>SR</text:p>
          </table:table-cell>
          <table:table-cell table:formula="of:=VLOOKUP([.I319];[$レアリティ番号.$A$1:$レアリティ番号.$B$4];2;0)" office:value-type="float" office:value="4" calcext:value-type="float">
            <text:p>4</text:p>
          </table:table-cell>
          <table:table-cell office:value-type="string" calcext:value-type="string">
            <text:p>イジン</text:p>
          </table:table-cell>
          <table:table-cell table:formula="of:=VLOOKUP([.K319];[$種類番号.$A$1:$種類番号.$B$4];2;0)" office:value-type="float" office:value="1" calcext:value-type="float">
            <text:p>1</text:p>
          </table:table-cell>
          <table:table-cell office:value-type="string" calcext:value-type="string">
            <text:p>紫</text:p>
          </table:table-cell>
          <table:table-cell table:formula="of:=VLOOKUP([.M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IF(ISNA([.$S319]);&quot;null&quot;;&quot;&quot;&quot;&quot;&amp;[.$S319]&amp;&quot;&quot;&quot;&quot;);[$JSON.$E$1];[.$U319];[$JSON.$F$1];IF(ISNA([.$W319]);&quot;null&quot;;&quot;&quot;&quot;&quot;&amp;[.$W319]&amp;&quot;&quot;&quot;&quot;);[$JSON.$G$1];[.$Y319];[$JSON.$H$1];[.$H319];[$JSON.$I$1];[.J319];[$JSON.$J$1];[.$L319];[$JSON.$K$1];[.$O319];[$JSON.$L$1];[.$N319];[$JSON.$M$1];[.$R319];[$JSON.$N$1];[.$T319];[$JSON.$O$1];IF(ISNA([.$V319]);&quot;null&quot;;[.$V319]);[$JSON.$P$1];[.$X319];[$JSON.$Q$1];[.$A319];[$JSON.$R$1];[.$B319];[$JSON.$S$1])" office:value-type="string" office:string-value="{&quot;id&quot;:&quot;4-10&quot;,&quot;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orderTable&quot;:319,&quot;orderDeck&quot;:235}," calcext:value-type="string">
            <text:p>{"id":"4-10","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office:value-type="string" calcext:value-type="string">
            <text:p>しまづなりあきら</text:p>
          </table:table-cell>
          <table:table-cell office:value-type="string" calcext:value-type="string">
            <text:p>第４弾ブースターパック</text:p>
          </table:table-cell>
          <table:table-cell table:formula="of:=VLOOKUP([.G320];[$収録番号.$A$1:$収録番号.$B$9];2;0)" office:value-type="float" office:value="45" calcext:value-type="float">
            <text:p>45</text:p>
          </table:table-cell>
          <table:table-cell office:value-type="string" calcext:value-type="string">
            <text:p>N</text:p>
          </table:table-cell>
          <table:table-cell table:formula="of:=VLOOKUP([.I320];[$レアリティ番号.$A$1:$レアリティ番号.$B$4];2;0)" office:value-type="float" office:value="1" calcext:value-type="float">
            <text:p>1</text:p>
          </table:table-cell>
          <table:table-cell office:value-type="string" calcext:value-type="string">
            <text:p>イジン</text:p>
          </table:table-cell>
          <table:table-cell table:formula="of:=VLOOKUP([.K320];[$種類番号.$A$1:$種類番号.$B$4];2;0)" office:value-type="float" office:value="1" calcext:value-type="float">
            <text:p>1</text:p>
          </table:table-cell>
          <table:table-cell office:value-type="string" calcext:value-type="string">
            <text:p>赤</text:p>
          </table:table-cell>
          <table:table-cell table:formula="of:=VLOOKUP([.M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IF(ISNA([.$S320]);&quot;null&quot;;&quot;&quot;&quot;&quot;&amp;[.$S320]&amp;&quot;&quot;&quot;&quot;);[$JSON.$E$1];[.$U320];[$JSON.$F$1];IF(ISNA([.$W320]);&quot;null&quot;;&quot;&quot;&quot;&quot;&amp;[.$W320]&amp;&quot;&quot;&quot;&quot;);[$JSON.$G$1];[.$Y320];[$JSON.$H$1];[.$H320];[$JSON.$I$1];[.J320];[$JSON.$J$1];[.$L320];[$JSON.$K$1];[.$O320];[$JSON.$L$1];[.$N320];[$JSON.$M$1];[.$R320];[$JSON.$N$1];[.$T320];[$JSON.$O$1];IF(ISNA([.$V320]);&quot;null&quot;;[.$V320]);[$JSON.$P$1];[.$X320];[$JSON.$Q$1];[.$A320];[$JSON.$R$1];[.$B320];[$JSON.$S$1])" office:value-type="string" office:string-value="{&quot;id&quot;:&quot;4-11&quot;,&quot;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orderTable&quot;:320,&quot;orderDeck&quot;:113}," calcext:value-type="string">
            <text:p>{"id":"4-11","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office:value-type="string" calcext:value-type="string">
            <text:p>しまづひさみつ</text:p>
          </table:table-cell>
          <table:table-cell office:value-type="string" calcext:value-type="string">
            <text:p>第４弾ブースターパック</text:p>
          </table:table-cell>
          <table:table-cell table:formula="of:=VLOOKUP([.G321];[$収録番号.$A$1:$収録番号.$B$9];2;0)" office:value-type="float" office:value="45" calcext:value-type="float">
            <text:p>45</text:p>
          </table:table-cell>
          <table:table-cell office:value-type="string" calcext:value-type="string">
            <text:p>N</text:p>
          </table:table-cell>
          <table:table-cell table:formula="of:=VLOOKUP([.I321];[$レアリティ番号.$A$1:$レアリティ番号.$B$4];2;0)" office:value-type="float" office:value="1" calcext:value-type="float">
            <text:p>1</text:p>
          </table:table-cell>
          <table:table-cell office:value-type="string" calcext:value-type="string">
            <text:p>イジン</text:p>
          </table:table-cell>
          <table:table-cell table:formula="of:=VLOOKUP([.K321];[$種類番号.$A$1:$種類番号.$B$4];2;0)" office:value-type="float" office:value="1" calcext:value-type="float">
            <text:p>1</text:p>
          </table:table-cell>
          <table:table-cell office:value-type="string" calcext:value-type="string">
            <text:p>赤</text:p>
          </table:table-cell>
          <table:table-cell table:formula="of:=VLOOKUP([.M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IF(ISNA([.$S321]);&quot;null&quot;;&quot;&quot;&quot;&quot;&amp;[.$S321]&amp;&quot;&quot;&quot;&quot;);[$JSON.$E$1];[.$U321];[$JSON.$F$1];IF(ISNA([.$W321]);&quot;null&quot;;&quot;&quot;&quot;&quot;&amp;[.$W321]&amp;&quot;&quot;&quot;&quot;);[$JSON.$G$1];[.$Y321];[$JSON.$H$1];[.$H321];[$JSON.$I$1];[.J321];[$JSON.$J$1];[.$L321];[$JSON.$K$1];[.$O321];[$JSON.$L$1];[.$N321];[$JSON.$M$1];[.$R321];[$JSON.$N$1];[.$T321];[$JSON.$O$1];IF(ISNA([.$V321]);&quot;null&quot;;[.$V321]);[$JSON.$P$1];[.$X321];[$JSON.$Q$1];[.$A321];[$JSON.$R$1];[.$B321];[$JSON.$S$1])" office:value-type="string" office:string-value="{&quot;id&quot;:&quot;4-12&quot;,&quot;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orderTable&quot;:321,&quot;orderDeck&quot;:30}," calcext:value-type="string">
            <text:p>{"id":"4-12","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G322];[$収録番号.$A$1:$収録番号.$B$9];2;0)" office:value-type="float" office:value="45" calcext:value-type="float">
            <text:p>45</text:p>
          </table:table-cell>
          <table:table-cell office:value-type="string" calcext:value-type="string">
            <text:p>N</text:p>
          </table:table-cell>
          <table:table-cell table:formula="of:=VLOOKUP([.I322];[$レアリティ番号.$A$1:$レアリティ番号.$B$4];2;0)" office:value-type="float" office:value="1" calcext:value-type="float">
            <text:p>1</text:p>
          </table:table-cell>
          <table:table-cell office:value-type="string" calcext:value-type="string">
            <text:p>イジン</text:p>
          </table:table-cell>
          <table:table-cell table:formula="of:=VLOOKUP([.K322];[$種類番号.$A$1:$種類番号.$B$4];2;0)" office:value-type="float" office:value="1" calcext:value-type="float">
            <text:p>1</text:p>
          </table:table-cell>
          <table:table-cell office:value-type="string" calcext:value-type="string">
            <text:p>赤</text:p>
          </table:table-cell>
          <table:table-cell table:formula="of:=VLOOKUP([.M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IF(ISNA([.$S322]);&quot;null&quot;;&quot;&quot;&quot;&quot;&amp;[.$S322]&amp;&quot;&quot;&quot;&quot;);[$JSON.$E$1];[.$U322];[$JSON.$F$1];IF(ISNA([.$W322]);&quot;null&quot;;&quot;&quot;&quot;&quot;&amp;[.$W322]&amp;&quot;&quot;&quot;&quot;);[$JSON.$G$1];[.$Y322];[$JSON.$H$1];[.$H322];[$JSON.$I$1];[.J322];[$JSON.$J$1];[.$L322];[$JSON.$K$1];[.$O322];[$JSON.$L$1];[.$N322];[$JSON.$M$1];[.$R322];[$JSON.$N$1];[.$T322];[$JSON.$O$1];IF(ISNA([.$V322]);&quot;null&quot;;[.$V322]);[$JSON.$P$1];[.$X322];[$JSON.$Q$1];[.$A322];[$JSON.$R$1];[.$B322];[$JSON.$S$1])" office:value-type="string" office:string-value="{&quot;id&quot;:&quot;4-13&quot;,&quot;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orderTable&quot;:322,&quot;orderDeck&quot;:152}," calcext:value-type="string">
            <text:p>{"id":"4-13","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G323];[$収録番号.$A$1:$収録番号.$B$9];2;0)" office:value-type="float" office:value="45" calcext:value-type="float">
            <text:p>45</text:p>
          </table:table-cell>
          <table:table-cell office:value-type="string" calcext:value-type="string">
            <text:p>N</text:p>
          </table:table-cell>
          <table:table-cell table:formula="of:=VLOOKUP([.I323];[$レアリティ番号.$A$1:$レアリティ番号.$B$4];2;0)" office:value-type="float" office:value="1" calcext:value-type="float">
            <text:p>1</text:p>
          </table:table-cell>
          <table:table-cell office:value-type="string" calcext:value-type="string">
            <text:p>イジン</text:p>
          </table:table-cell>
          <table:table-cell table:formula="of:=VLOOKUP([.K323];[$種類番号.$A$1:$種類番号.$B$4];2;0)" office:value-type="float" office:value="1" calcext:value-type="float">
            <text:p>1</text:p>
          </table:table-cell>
          <table:table-cell office:value-type="string" calcext:value-type="string">
            <text:p>赤</text:p>
          </table:table-cell>
          <table:table-cell table:formula="of:=VLOOKUP([.M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IF(ISNA([.$S323]);&quot;null&quot;;&quot;&quot;&quot;&quot;&amp;[.$S323]&amp;&quot;&quot;&quot;&quot;);[$JSON.$E$1];[.$U323];[$JSON.$F$1];IF(ISNA([.$W323]);&quot;null&quot;;&quot;&quot;&quot;&quot;&amp;[.$W323]&amp;&quot;&quot;&quot;&quot;);[$JSON.$G$1];[.$Y323];[$JSON.$H$1];[.$H323];[$JSON.$I$1];[.J323];[$JSON.$J$1];[.$L323];[$JSON.$K$1];[.$O323];[$JSON.$L$1];[.$N323];[$JSON.$M$1];[.$R323];[$JSON.$N$1];[.$T323];[$JSON.$O$1];IF(ISNA([.$V323]);&quot;null&quot;;[.$V323]);[$JSON.$P$1];[.$X323];[$JSON.$Q$1];[.$A323];[$JSON.$R$1];[.$B323];[$JSON.$S$1])" office:value-type="string" office:string-value="{&quot;id&quot;:&quot;4-14&quot;,&quot;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orderTable&quot;:323,&quot;orderDeck&quot;:153}," calcext:value-type="string">
            <text:p>{"id":"4-14","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table:number-columns-repeated="2" office:value-type="string" calcext:value-type="string">
            <text:p>ねね</text:p>
          </table:table-cell>
          <table:table-cell office:value-type="string" calcext:value-type="string">
            <text:p>第４弾ブースターパック</text:p>
          </table:table-cell>
          <table:table-cell table:formula="of:=VLOOKUP([.G324];[$収録番号.$A$1:$収録番号.$B$9];2;0)" office:value-type="float" office:value="45" calcext:value-type="float">
            <text:p>45</text:p>
          </table:table-cell>
          <table:table-cell office:value-type="string" calcext:value-type="string">
            <text:p>R</text:p>
          </table:table-cell>
          <table:table-cell table:formula="of:=VLOOKUP([.I324];[$レアリティ番号.$A$1:$レアリティ番号.$B$4];2;0)" office:value-type="float" office:value="2" calcext:value-type="float">
            <text:p>2</text:p>
          </table:table-cell>
          <table:table-cell office:value-type="string" calcext:value-type="string">
            <text:p>イジン</text:p>
          </table:table-cell>
          <table:table-cell table:formula="of:=VLOOKUP([.K324];[$種類番号.$A$1:$種類番号.$B$4];2;0)" office:value-type="float" office:value="1" calcext:value-type="float">
            <text:p>1</text:p>
          </table:table-cell>
          <table:table-cell office:value-type="string" calcext:value-type="string">
            <text:p>赤</text:p>
          </table:table-cell>
          <table:table-cell table:formula="of:=VLOOKUP([.M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office:value-type="float" office:value="500" calcext:value-type="float">
            <text:p>500</text:p>
          </table:table-cell>
          <table:table-cell table:style-name="ce8" office:value-type="string" calcext:value-type="string">
            <text:p>反魂</text:p>
          </table:table-cell>
          <table:table-cell table:formula="of:=IFERROR(VLOOKUP([.$W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IF(ISNA([.$S324]);&quot;null&quot;;&quot;&quot;&quot;&quot;&amp;[.$S324]&amp;&quot;&quot;&quot;&quot;);[$JSON.$E$1];[.$U324];[$JSON.$F$1];IF(ISNA([.$W324]);&quot;null&quot;;&quot;&quot;&quot;&quot;&amp;[.$W324]&amp;&quot;&quot;&quot;&quot;);[$JSON.$G$1];[.$Y324];[$JSON.$H$1];[.$H324];[$JSON.$I$1];[.J324];[$JSON.$J$1];[.$L324];[$JSON.$K$1];[.$O324];[$JSON.$L$1];[.$N324];[$JSON.$M$1];[.$R324];[$JSON.$N$1];[.$T324];[$JSON.$O$1];IF(ISNA([.$V324]);&quot;null&quot;;[.$V324]);[$JSON.$P$1];[.$X324];[$JSON.$Q$1];[.$A324];[$JSON.$R$1];[.$B324];[$JSON.$S$1])" office:value-type="string" office:string-value="{&quot;id&quot;:&quot;4-15&quot;,&quot;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orderTable&quot;:324,&quot;orderDeck&quot;:31}," calcext:value-type="string">
            <text:p>{"id":"4-15","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G325];[$収録番号.$A$1:$収録番号.$B$9];2;0)" office:value-type="float" office:value="45" calcext:value-type="float">
            <text:p>45</text:p>
          </table:table-cell>
          <table:table-cell office:value-type="string" calcext:value-type="string">
            <text:p>R</text:p>
          </table:table-cell>
          <table:table-cell table:formula="of:=VLOOKUP([.I325];[$レアリティ番号.$A$1:$レアリティ番号.$B$4];2;0)" office:value-type="float" office:value="2" calcext:value-type="float">
            <text:p>2</text:p>
          </table:table-cell>
          <table:table-cell office:value-type="string" calcext:value-type="string">
            <text:p>イジン</text:p>
          </table:table-cell>
          <table:table-cell table:formula="of:=VLOOKUP([.K325];[$種類番号.$A$1:$種類番号.$B$4];2;0)" office:value-type="float" office:value="1" calcext:value-type="float">
            <text:p>1</text:p>
          </table:table-cell>
          <table:table-cell office:value-type="string" calcext:value-type="string">
            <text:p>赤</text:p>
          </table:table-cell>
          <table:table-cell table:formula="of:=VLOOKUP([.M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office:value-type="float" office:value="4000" calcext:value-type="float">
            <text:p>4000</text:p>
          </table:table-cell>
          <table:table-cell table:style-name="ce8" table:formula="of:=NA()" office:value-type="string" office:string-value="" calcext:value-type="error">
            <text:p>#N/A</text:p>
          </table:table-cell>
          <table:table-cell table:formula="of:=IFERROR(VLOOKUP([.$W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IF(ISNA([.$S325]);&quot;null&quot;;&quot;&quot;&quot;&quot;&amp;[.$S325]&amp;&quot;&quot;&quot;&quot;);[$JSON.$E$1];[.$U325];[$JSON.$F$1];IF(ISNA([.$W325]);&quot;null&quot;;&quot;&quot;&quot;&quot;&amp;[.$W325]&amp;&quot;&quot;&quot;&quot;);[$JSON.$G$1];[.$Y325];[$JSON.$H$1];[.$H325];[$JSON.$I$1];[.J325];[$JSON.$J$1];[.$L325];[$JSON.$K$1];[.$O325];[$JSON.$L$1];[.$N325];[$JSON.$M$1];[.$R325];[$JSON.$N$1];[.$T325];[$JSON.$O$1];IF(ISNA([.$V325]);&quot;null&quot;;[.$V325]);[$JSON.$P$1];[.$X325];[$JSON.$Q$1];[.$A325];[$JSON.$R$1];[.$B325];[$JSON.$S$1])" office:value-type="string" office:string-value="{&quot;id&quot;:&quot;4-16&quot;,&quot;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orderTable&quot;:325,&quot;orderDeck&quot;:185}," calcext:value-type="string">
            <text:p>{"id":"4-16","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G326];[$収録番号.$A$1:$収録番号.$B$9];2;0)" office:value-type="float" office:value="45" calcext:value-type="float">
            <text:p>45</text:p>
          </table:table-cell>
          <table:table-cell office:value-type="string" calcext:value-type="string">
            <text:p>R</text:p>
          </table:table-cell>
          <table:table-cell table:formula="of:=VLOOKUP([.I326];[$レアリティ番号.$A$1:$レアリティ番号.$B$4];2;0)" office:value-type="float" office:value="2" calcext:value-type="float">
            <text:p>2</text:p>
          </table:table-cell>
          <table:table-cell office:value-type="string" calcext:value-type="string">
            <text:p>イジン</text:p>
          </table:table-cell>
          <table:table-cell table:formula="of:=VLOOKUP([.K326];[$種類番号.$A$1:$種類番号.$B$4];2;0)" office:value-type="float" office:value="1" calcext:value-type="float">
            <text:p>1</text:p>
          </table:table-cell>
          <table:table-cell office:value-type="string" calcext:value-type="string">
            <text:p>青</text:p>
          </table:table-cell>
          <table:table-cell table:formula="of:=VLOOKUP([.M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6];[$能力語番号.$A$1:$能力語番号.$B$10];2;0);0)" office:value-type="float" office:value="0" calcext:value-type="float">
            <text:p>0</text:p>
          </table:table-cell>
          <table:table-cell office:value-type="string" calcext:value-type="string">
            <text:p>思想</text:p>
          </table:table-cell>
          <table:table-cell table:formula="of:=IFERROR(VLOOKUP([.$S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office:value-type="float" office:value="2000" calcext:value-type="float">
            <text:p>2000</text:p>
          </table:table-cell>
          <table:table-cell table:style-name="ce8" office:value-type="string" calcext:value-type="string">
            <text:p>喪神</text:p>
          </table:table-cell>
          <table:table-cell table:formula="of:=IFERROR(VLOOKUP([.$W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IF(ISNA([.$S326]);&quot;null&quot;;&quot;&quot;&quot;&quot;&amp;[.$S326]&amp;&quot;&quot;&quot;&quot;);[$JSON.$E$1];[.$U326];[$JSON.$F$1];IF(ISNA([.$W326]);&quot;null&quot;;&quot;&quot;&quot;&quot;&amp;[.$W326]&amp;&quot;&quot;&quot;&quot;);[$JSON.$G$1];[.$Y326];[$JSON.$H$1];[.$H326];[$JSON.$I$1];[.J326];[$JSON.$J$1];[.$L326];[$JSON.$K$1];[.$O326];[$JSON.$L$1];[.$N326];[$JSON.$M$1];[.$R326];[$JSON.$N$1];[.$T326];[$JSON.$O$1];IF(ISNA([.$V326]);&quot;null&quot;;[.$V326]);[$JSON.$P$1];[.$X326];[$JSON.$Q$1];[.$A326];[$JSON.$R$1];[.$B326];[$JSON.$S$1])" office:value-type="string" office:string-value="{&quot;id&quot;:&quot;4-17&quot;,&quot;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orderTable&quot;:326,&quot;orderDeck&quot;:82}," calcext:value-type="string">
            <text:p>{"id":"4-17","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G327];[$収録番号.$A$1:$収録番号.$B$9];2;0)" office:value-type="float" office:value="45" calcext:value-type="float">
            <text:p>45</text:p>
          </table:table-cell>
          <table:table-cell office:value-type="string" calcext:value-type="string">
            <text:p>N</text:p>
          </table:table-cell>
          <table:table-cell table:formula="of:=VLOOKUP([.I327];[$レアリティ番号.$A$1:$レアリティ番号.$B$4];2;0)" office:value-type="float" office:value="1" calcext:value-type="float">
            <text:p>1</text:p>
          </table:table-cell>
          <table:table-cell office:value-type="string" calcext:value-type="string">
            <text:p>イジン</text:p>
          </table:table-cell>
          <table:table-cell table:formula="of:=VLOOKUP([.K327];[$種類番号.$A$1:$種類番号.$B$4];2;0)" office:value-type="float" office:value="1" calcext:value-type="float">
            <text:p>1</text:p>
          </table:table-cell>
          <table:table-cell office:value-type="string" calcext:value-type="string">
            <text:p>青</text:p>
          </table:table-cell>
          <table:table-cell table:formula="of:=VLOOKUP([.M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office:value-type="float" office:value="2000" calcext:value-type="float">
            <text:p>2000</text:p>
          </table:table-cell>
          <table:table-cell table:style-name="ce8" office:value-type="string" calcext:value-type="string">
            <text:p>木霊</text:p>
          </table:table-cell>
          <table:table-cell table:formula="of:=IFERROR(VLOOKUP([.$W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IF(ISNA([.$S327]);&quot;null&quot;;&quot;&quot;&quot;&quot;&amp;[.$S327]&amp;&quot;&quot;&quot;&quot;);[$JSON.$E$1];[.$U327];[$JSON.$F$1];IF(ISNA([.$W327]);&quot;null&quot;;&quot;&quot;&quot;&quot;&amp;[.$W327]&amp;&quot;&quot;&quot;&quot;);[$JSON.$G$1];[.$Y327];[$JSON.$H$1];[.$H327];[$JSON.$I$1];[.J327];[$JSON.$J$1];[.$L327];[$JSON.$K$1];[.$O327];[$JSON.$L$1];[.$N327];[$JSON.$M$1];[.$R327];[$JSON.$N$1];[.$T327];[$JSON.$O$1];IF(ISNA([.$V327]);&quot;null&quot;;[.$V327]);[$JSON.$P$1];[.$X327];[$JSON.$Q$1];[.$A327];[$JSON.$R$1];[.$B327];[$JSON.$S$1])" office:value-type="string" office:string-value="{&quot;id&quot;:&quot;4-18&quot;,&quot;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orderTable&quot;:327,&quot;orderDeck&quot;:162}," calcext:value-type="string">
            <text:p>{"id":"4-18","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G328];[$収録番号.$A$1:$収録番号.$B$9];2;0)" office:value-type="float" office:value="45" calcext:value-type="float">
            <text:p>45</text:p>
          </table:table-cell>
          <table:table-cell office:value-type="string" calcext:value-type="string">
            <text:p>N</text:p>
          </table:table-cell>
          <table:table-cell table:formula="of:=VLOOKUP([.I328];[$レアリティ番号.$A$1:$レアリティ番号.$B$4];2;0)" office:value-type="float" office:value="1" calcext:value-type="float">
            <text:p>1</text:p>
          </table:table-cell>
          <table:table-cell office:value-type="string" calcext:value-type="string">
            <text:p>イジン</text:p>
          </table:table-cell>
          <table:table-cell table:formula="of:=VLOOKUP([.K328];[$種類番号.$A$1:$種類番号.$B$4];2;0)" office:value-type="float" office:value="1" calcext:value-type="float">
            <text:p>1</text:p>
          </table:table-cell>
          <table:table-cell office:value-type="string" calcext:value-type="string">
            <text:p>青</text:p>
          </table:table-cell>
          <table:table-cell table:formula="of:=VLOOKUP([.M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IF(ISNA([.$S328]);&quot;null&quot;;&quot;&quot;&quot;&quot;&amp;[.$S328]&amp;&quot;&quot;&quot;&quot;);[$JSON.$E$1];[.$U328];[$JSON.$F$1];IF(ISNA([.$W328]);&quot;null&quot;;&quot;&quot;&quot;&quot;&amp;[.$W328]&amp;&quot;&quot;&quot;&quot;);[$JSON.$G$1];[.$Y328];[$JSON.$H$1];[.$H328];[$JSON.$I$1];[.J328];[$JSON.$J$1];[.$L328];[$JSON.$K$1];[.$O328];[$JSON.$L$1];[.$N328];[$JSON.$M$1];[.$R328];[$JSON.$N$1];[.$T328];[$JSON.$O$1];IF(ISNA([.$V328]);&quot;null&quot;;[.$V328]);[$JSON.$P$1];[.$X328];[$JSON.$Q$1];[.$A328];[$JSON.$R$1];[.$B328];[$JSON.$S$1])" office:value-type="string" office:string-value="{&quot;id&quot;:&quot;4-19&quot;,&quot;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orderTable&quot;:328,&quot;orderDeck&quot;:42}," calcext:value-type="string">
            <text:p>{"id":"4-19","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G329];[$収録番号.$A$1:$収録番号.$B$9];2;0)" office:value-type="float" office:value="45" calcext:value-type="float">
            <text:p>45</text:p>
          </table:table-cell>
          <table:table-cell office:value-type="string" calcext:value-type="string">
            <text:p>N</text:p>
          </table:table-cell>
          <table:table-cell table:formula="of:=VLOOKUP([.I329];[$レアリティ番号.$A$1:$レアリティ番号.$B$4];2;0)" office:value-type="float" office:value="1" calcext:value-type="float">
            <text:p>1</text:p>
          </table:table-cell>
          <table:table-cell office:value-type="string" calcext:value-type="string">
            <text:p>イジン</text:p>
          </table:table-cell>
          <table:table-cell table:formula="of:=VLOOKUP([.K329];[$種類番号.$A$1:$種類番号.$B$4];2;0)" office:value-type="float" office:value="1" calcext:value-type="float">
            <text:p>1</text:p>
          </table:table-cell>
          <table:table-cell office:value-type="string" calcext:value-type="string">
            <text:p>青</text:p>
          </table:table-cell>
          <table:table-cell table:formula="of:=VLOOKUP([.M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29];[$能力語番号.$A$1:$能力語番号.$B$10];2;0);0)" office:value-type="float" office:value="0" calcext:value-type="float">
            <text:p>0</text:p>
          </table:table-cell>
          <table:table-cell office:value-type="string" calcext:value-type="string">
            <text:p>音楽</text:p>
          </table:table-cell>
          <table:table-cell table:formula="of:=IFERROR(VLOOKUP([.$S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IF(ISNA([.$S329]);&quot;null&quot;;&quot;&quot;&quot;&quot;&amp;[.$S329]&amp;&quot;&quot;&quot;&quot;);[$JSON.$E$1];[.$U329];[$JSON.$F$1];IF(ISNA([.$W329]);&quot;null&quot;;&quot;&quot;&quot;&quot;&amp;[.$W329]&amp;&quot;&quot;&quot;&quot;);[$JSON.$G$1];[.$Y329];[$JSON.$H$1];[.$H329];[$JSON.$I$1];[.J329];[$JSON.$J$1];[.$L329];[$JSON.$K$1];[.$O329];[$JSON.$L$1];[.$N329];[$JSON.$M$1];[.$R329];[$JSON.$N$1];[.$T329];[$JSON.$O$1];IF(ISNA([.$V329]);&quot;null&quot;;[.$V329]);[$JSON.$P$1];[.$X329];[$JSON.$Q$1];[.$A329];[$JSON.$R$1];[.$B329];[$JSON.$S$1])" office:value-type="string" office:string-value="{&quot;id&quot;:&quot;4-20&quot;,&quot;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orderTable&quot;:329,&quot;orderDeck&quot;:43}," calcext:value-type="string">
            <text:p>{"id":"4-20","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G330];[$収録番号.$A$1:$収録番号.$B$9];2;0)" office:value-type="float" office:value="45" calcext:value-type="float">
            <text:p>45</text:p>
          </table:table-cell>
          <table:table-cell office:value-type="string" calcext:value-type="string">
            <text:p>N</text:p>
          </table:table-cell>
          <table:table-cell table:formula="of:=VLOOKUP([.I330];[$レアリティ番号.$A$1:$レアリティ番号.$B$4];2;0)" office:value-type="float" office:value="1" calcext:value-type="float">
            <text:p>1</text:p>
          </table:table-cell>
          <table:table-cell office:value-type="string" calcext:value-type="string">
            <text:p>イジン</text:p>
          </table:table-cell>
          <table:table-cell table:formula="of:=VLOOKUP([.K330];[$種類番号.$A$1:$種類番号.$B$4];2;0)" office:value-type="float" office:value="1" calcext:value-type="float">
            <text:p>1</text:p>
          </table:table-cell>
          <table:table-cell office:value-type="string" calcext:value-type="string">
            <text:p>青</text:p>
          </table:table-cell>
          <table:table-cell table:formula="of:=VLOOKUP([.M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0];[$能力語番号.$A$1:$能力語番号.$B$10];2;0);0)" office:value-type="float" office:value="0" calcext:value-type="float">
            <text:p>0</text:p>
          </table:table-cell>
          <table:table-cell office:value-type="string" calcext:value-type="string">
            <text:p>音楽</text:p>
          </table:table-cell>
          <table:table-cell table:formula="of:=IFERROR(VLOOKUP([.$S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IF(ISNA([.$S330]);&quot;null&quot;;&quot;&quot;&quot;&quot;&amp;[.$S330]&amp;&quot;&quot;&quot;&quot;);[$JSON.$E$1];[.$U330];[$JSON.$F$1];IF(ISNA([.$W330]);&quot;null&quot;;&quot;&quot;&quot;&quot;&amp;[.$W330]&amp;&quot;&quot;&quot;&quot;);[$JSON.$G$1];[.$Y330];[$JSON.$H$1];[.$H330];[$JSON.$I$1];[.J330];[$JSON.$J$1];[.$L330];[$JSON.$K$1];[.$O330];[$JSON.$L$1];[.$N330];[$JSON.$M$1];[.$R330];[$JSON.$N$1];[.$T330];[$JSON.$O$1];IF(ISNA([.$V330]);&quot;null&quot;;[.$V330]);[$JSON.$P$1];[.$X330];[$JSON.$Q$1];[.$A330];[$JSON.$R$1];[.$B330];[$JSON.$S$1])" office:value-type="string" office:string-value="{&quot;id&quot;:&quot;4-21&quot;,&quot;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orderTable&quot;:330,&quot;orderDeck&quot;:11}," calcext:value-type="string">
            <text:p>{"id":"4-21","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G331];[$収録番号.$A$1:$収録番号.$B$9];2;0)" office:value-type="float" office:value="45" calcext:value-type="float">
            <text:p>45</text:p>
          </table:table-cell>
          <table:table-cell office:value-type="string" calcext:value-type="string">
            <text:p>R</text:p>
          </table:table-cell>
          <table:table-cell table:formula="of:=VLOOKUP([.I331];[$レアリティ番号.$A$1:$レアリティ番号.$B$4];2;0)" office:value-type="float" office:value="2" calcext:value-type="float">
            <text:p>2</text:p>
          </table:table-cell>
          <table:table-cell office:value-type="string" calcext:value-type="string">
            <text:p>イジン</text:p>
          </table:table-cell>
          <table:table-cell table:formula="of:=VLOOKUP([.K331];[$種類番号.$A$1:$種類番号.$B$4];2;0)" office:value-type="float" office:value="1" calcext:value-type="float">
            <text:p>1</text:p>
          </table:table-cell>
          <table:table-cell office:value-type="string" calcext:value-type="string">
            <text:p>青</text:p>
          </table:table-cell>
          <table:table-cell table:formula="of:=VLOOKUP([.M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1];[$能力語番号.$A$1:$能力語番号.$B$10];2;0);0)" office:value-type="float" office:value="0" calcext:value-type="float">
            <text:p>0</text:p>
          </table:table-cell>
          <table:table-cell office:value-type="string" calcext:value-type="string">
            <text:p>音楽</text:p>
          </table:table-cell>
          <table:table-cell table:formula="of:=IFERROR(VLOOKUP([.$S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IF(ISNA([.$S331]);&quot;null&quot;;&quot;&quot;&quot;&quot;&amp;[.$S331]&amp;&quot;&quot;&quot;&quot;);[$JSON.$E$1];[.$U331];[$JSON.$F$1];IF(ISNA([.$W331]);&quot;null&quot;;&quot;&quot;&quot;&quot;&amp;[.$W331]&amp;&quot;&quot;&quot;&quot;);[$JSON.$G$1];[.$Y331];[$JSON.$H$1];[.$H331];[$JSON.$I$1];[.J331];[$JSON.$J$1];[.$L331];[$JSON.$K$1];[.$O331];[$JSON.$L$1];[.$N331];[$JSON.$M$1];[.$R331];[$JSON.$N$1];[.$T331];[$JSON.$O$1];IF(ISNA([.$V331]);&quot;null&quot;;[.$V331]);[$JSON.$P$1];[.$X331];[$JSON.$Q$1];[.$A331];[$JSON.$R$1];[.$B331];[$JSON.$S$1])" office:value-type="string" office:string-value="{&quot;id&quot;:&quot;4-22&quot;,&quot;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orderTable&quot;:331,&quot;orderDeck&quot;:83}," calcext:value-type="string">
            <text:p>{"id":"4-22","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G332];[$収録番号.$A$1:$収録番号.$B$9];2;0)" office:value-type="float" office:value="45" calcext:value-type="float">
            <text:p>45</text:p>
          </table:table-cell>
          <table:table-cell office:value-type="string" calcext:value-type="string">
            <text:p>R</text:p>
          </table:table-cell>
          <table:table-cell table:formula="of:=VLOOKUP([.I332];[$レアリティ番号.$A$1:$レアリティ番号.$B$4];2;0)" office:value-type="float" office:value="2" calcext:value-type="float">
            <text:p>2</text:p>
          </table:table-cell>
          <table:table-cell office:value-type="string" calcext:value-type="string">
            <text:p>イジン</text:p>
          </table:table-cell>
          <table:table-cell table:formula="of:=VLOOKUP([.K332];[$種類番号.$A$1:$種類番号.$B$4];2;0)" office:value-type="float" office:value="1" calcext:value-type="float">
            <text:p>1</text:p>
          </table:table-cell>
          <table:table-cell office:value-type="string" calcext:value-type="string">
            <text:p>緑</text:p>
          </table:table-cell>
          <table:table-cell table:formula="of:=VLOOKUP([.M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office:value-type="float" office:value="6000" calcext:value-type="float">
            <text:p>6000</text:p>
          </table:table-cell>
          <table:table-cell table:style-name="ce8" table:formula="of:=NA()" office:value-type="string" office:string-value="" calcext:value-type="error">
            <text:p>#N/A</text:p>
          </table:table-cell>
          <table:table-cell table:formula="of:=IFERROR(VLOOKUP([.$W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IF(ISNA([.$S332]);&quot;null&quot;;&quot;&quot;&quot;&quot;&amp;[.$S332]&amp;&quot;&quot;&quot;&quot;);[$JSON.$E$1];[.$U332];[$JSON.$F$1];IF(ISNA([.$W332]);&quot;null&quot;;&quot;&quot;&quot;&quot;&amp;[.$W332]&amp;&quot;&quot;&quot;&quot;);[$JSON.$G$1];[.$Y332];[$JSON.$H$1];[.$H332];[$JSON.$I$1];[.J332];[$JSON.$J$1];[.$L332];[$JSON.$K$1];[.$O332];[$JSON.$L$1];[.$N332];[$JSON.$M$1];[.$R332];[$JSON.$N$1];[.$T332];[$JSON.$O$1];IF(ISNA([.$V332]);&quot;null&quot;;[.$V332]);[$JSON.$P$1];[.$X332];[$JSON.$Q$1];[.$A332];[$JSON.$R$1];[.$B332];[$JSON.$S$1])" office:value-type="string" office:string-value="{&quot;id&quot;:&quot;4-23&quot;,&quot;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orderTable&quot;:332,&quot;orderDeck&quot;:212}," calcext:value-type="string">
            <text:p>{"id":"4-23","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G333];[$収録番号.$A$1:$収録番号.$B$9];2;0)" office:value-type="float" office:value="45" calcext:value-type="float">
            <text:p>45</text:p>
          </table:table-cell>
          <table:table-cell office:value-type="string" calcext:value-type="string">
            <text:p>N</text:p>
          </table:table-cell>
          <table:table-cell table:formula="of:=VLOOKUP([.I333];[$レアリティ番号.$A$1:$レアリティ番号.$B$4];2;0)" office:value-type="float" office:value="1" calcext:value-type="float">
            <text:p>1</text:p>
          </table:table-cell>
          <table:table-cell office:value-type="string" calcext:value-type="string">
            <text:p>イジン</text:p>
          </table:table-cell>
          <table:table-cell table:formula="of:=VLOOKUP([.K333];[$種類番号.$A$1:$種類番号.$B$4];2;0)" office:value-type="float" office:value="1" calcext:value-type="float">
            <text:p>1</text:p>
          </table:table-cell>
          <table:table-cell office:value-type="string" calcext:value-type="string">
            <text:p>緑</text:p>
          </table:table-cell>
          <table:table-cell table:formula="of:=VLOOKUP([.M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3];[$能力語番号.$A$1:$能力語番号.$B$10];2;0);0)" office:value-type="float" office:value="0" calcext:value-type="float">
            <text:p>0</text:p>
          </table:table-cell>
          <table:table-cell office:value-type="string" calcext:value-type="string">
            <text:p>音楽</text:p>
          </table:table-cell>
          <table:table-cell table:formula="of:=IFERROR(VLOOKUP([.$S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IF(ISNA([.$S333]);&quot;null&quot;;&quot;&quot;&quot;&quot;&amp;[.$S333]&amp;&quot;&quot;&quot;&quot;);[$JSON.$E$1];[.$U333];[$JSON.$F$1];IF(ISNA([.$W333]);&quot;null&quot;;&quot;&quot;&quot;&quot;&amp;[.$W333]&amp;&quot;&quot;&quot;&quot;);[$JSON.$G$1];[.$Y333];[$JSON.$H$1];[.$H333];[$JSON.$I$1];[.J333];[$JSON.$J$1];[.$L333];[$JSON.$K$1];[.$O333];[$JSON.$L$1];[.$N333];[$JSON.$M$1];[.$R333];[$JSON.$N$1];[.$T333];[$JSON.$O$1];IF(ISNA([.$V333]);&quot;null&quot;;[.$V333]);[$JSON.$P$1];[.$X333];[$JSON.$Q$1];[.$A333];[$JSON.$R$1];[.$B333];[$JSON.$S$1])" office:value-type="string" office:string-value="{&quot;id&quot;:&quot;4-24&quot;,&quot;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orderTable&quot;:333,&quot;orderDeck&quot;:92}," calcext:value-type="string">
            <text:p>{"id":"4-24","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G334];[$収録番号.$A$1:$収録番号.$B$9];2;0)" office:value-type="float" office:value="45" calcext:value-type="float">
            <text:p>45</text:p>
          </table:table-cell>
          <table:table-cell office:value-type="string" calcext:value-type="string">
            <text:p>N</text:p>
          </table:table-cell>
          <table:table-cell table:formula="of:=VLOOKUP([.I334];[$レアリティ番号.$A$1:$レアリティ番号.$B$4];2;0)" office:value-type="float" office:value="1" calcext:value-type="float">
            <text:p>1</text:p>
          </table:table-cell>
          <table:table-cell office:value-type="string" calcext:value-type="string">
            <text:p>イジン</text:p>
          </table:table-cell>
          <table:table-cell table:formula="of:=VLOOKUP([.K334];[$種類番号.$A$1:$種類番号.$B$4];2;0)" office:value-type="float" office:value="1" calcext:value-type="float">
            <text:p>1</text:p>
          </table:table-cell>
          <table:table-cell office:value-type="string" calcext:value-type="string">
            <text:p>緑</text:p>
          </table:table-cell>
          <table:table-cell table:formula="of:=VLOOKUP([.M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IF(ISNA([.$S334]);&quot;null&quot;;&quot;&quot;&quot;&quot;&amp;[.$S334]&amp;&quot;&quot;&quot;&quot;);[$JSON.$E$1];[.$U334];[$JSON.$F$1];IF(ISNA([.$W334]);&quot;null&quot;;&quot;&quot;&quot;&quot;&amp;[.$W334]&amp;&quot;&quot;&quot;&quot;);[$JSON.$G$1];[.$Y334];[$JSON.$H$1];[.$H334];[$JSON.$I$1];[.J334];[$JSON.$J$1];[.$L334];[$JSON.$K$1];[.$O334];[$JSON.$L$1];[.$N334];[$JSON.$M$1];[.$R334];[$JSON.$N$1];[.$T334];[$JSON.$O$1];IF(ISNA([.$V334]);&quot;null&quot;;[.$V334]);[$JSON.$P$1];[.$X334];[$JSON.$Q$1];[.$A334];[$JSON.$R$1];[.$B334];[$JSON.$S$1])" office:value-type="string" office:string-value="{&quot;id&quot;:&quot;4-25&quot;,&quot;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orderTable&quot;:334,&quot;orderDeck&quot;:170}," calcext:value-type="string">
            <text:p>{"id":"4-25","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G335];[$収録番号.$A$1:$収録番号.$B$9];2;0)" office:value-type="float" office:value="45" calcext:value-type="float">
            <text:p>45</text:p>
          </table:table-cell>
          <table:table-cell office:value-type="string" calcext:value-type="string">
            <text:p>N</text:p>
          </table:table-cell>
          <table:table-cell table:formula="of:=VLOOKUP([.I335];[$レアリティ番号.$A$1:$レアリティ番号.$B$4];2;0)" office:value-type="float" office:value="1" calcext:value-type="float">
            <text:p>1</text:p>
          </table:table-cell>
          <table:table-cell office:value-type="string" calcext:value-type="string">
            <text:p>イジン</text:p>
          </table:table-cell>
          <table:table-cell table:formula="of:=VLOOKUP([.K335];[$種類番号.$A$1:$種類番号.$B$4];2;0)" office:value-type="float" office:value="1" calcext:value-type="float">
            <text:p>1</text:p>
          </table:table-cell>
          <table:table-cell office:value-type="string" calcext:value-type="string">
            <text:p>緑</text:p>
          </table:table-cell>
          <table:table-cell table:formula="of:=VLOOKUP([.M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IF(ISNA([.$S335]);&quot;null&quot;;&quot;&quot;&quot;&quot;&amp;[.$S335]&amp;&quot;&quot;&quot;&quot;);[$JSON.$E$1];[.$U335];[$JSON.$F$1];IF(ISNA([.$W335]);&quot;null&quot;;&quot;&quot;&quot;&quot;&amp;[.$W335]&amp;&quot;&quot;&quot;&quot;);[$JSON.$G$1];[.$Y335];[$JSON.$H$1];[.$H335];[$JSON.$I$1];[.J335];[$JSON.$J$1];[.$L335];[$JSON.$K$1];[.$O335];[$JSON.$L$1];[.$N335];[$JSON.$M$1];[.$R335];[$JSON.$N$1];[.$T335];[$JSON.$O$1];IF(ISNA([.$V335]);&quot;null&quot;;[.$V335]);[$JSON.$P$1];[.$X335];[$JSON.$Q$1];[.$A335];[$JSON.$R$1];[.$B335];[$JSON.$S$1])" office:value-type="string" office:string-value="{&quot;id&quot;:&quot;4-26&quot;,&quot;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orderTable&quot;:335,&quot;orderDeck&quot;:51}," calcext:value-type="string">
            <text:p>{"id":"4-26","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G336];[$収録番号.$A$1:$収録番号.$B$9];2;0)" office:value-type="float" office:value="45" calcext:value-type="float">
            <text:p>45</text:p>
          </table:table-cell>
          <table:table-cell office:value-type="string" calcext:value-type="string">
            <text:p>N</text:p>
          </table:table-cell>
          <table:table-cell table:formula="of:=VLOOKUP([.I336];[$レアリティ番号.$A$1:$レアリティ番号.$B$4];2;0)" office:value-type="float" office:value="1" calcext:value-type="float">
            <text:p>1</text:p>
          </table:table-cell>
          <table:table-cell office:value-type="string" calcext:value-type="string">
            <text:p>イジン</text:p>
          </table:table-cell>
          <table:table-cell table:formula="of:=VLOOKUP([.K336];[$種類番号.$A$1:$種類番号.$B$4];2;0)" office:value-type="float" office:value="1" calcext:value-type="float">
            <text:p>1</text:p>
          </table:table-cell>
          <table:table-cell office:value-type="string" calcext:value-type="string">
            <text:p>緑</text:p>
          </table:table-cell>
          <table:table-cell table:formula="of:=VLOOKUP([.M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6];[$能力語番号.$A$1:$能力語番号.$B$10];2;0);0)" office:value-type="float" office:value="0" calcext:value-type="float">
            <text:p>0</text:p>
          </table:table-cell>
          <table:table-cell office:value-type="string" calcext:value-type="string">
            <text:p>美術</text:p>
          </table:table-cell>
          <table:table-cell table:formula="of:=IFERROR(VLOOKUP([.$S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office:value-type="float" office:value="3000" calcext:value-type="float">
            <text:p>3000</text:p>
          </table:table-cell>
          <table:table-cell table:style-name="ce8" office:value-type="string" calcext:value-type="string">
            <text:p>1ドローする</text:p>
          </table:table-cell>
          <table:table-cell table:formula="of:=IFERROR(VLOOKUP([.$W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IF(ISNA([.$S336]);&quot;null&quot;;&quot;&quot;&quot;&quot;&amp;[.$S336]&amp;&quot;&quot;&quot;&quot;);[$JSON.$E$1];[.$U336];[$JSON.$F$1];IF(ISNA([.$W336]);&quot;null&quot;;&quot;&quot;&quot;&quot;&amp;[.$W336]&amp;&quot;&quot;&quot;&quot;);[$JSON.$G$1];[.$Y336];[$JSON.$H$1];[.$H336];[$JSON.$I$1];[.J336];[$JSON.$J$1];[.$L336];[$JSON.$K$1];[.$O336];[$JSON.$L$1];[.$N336];[$JSON.$M$1];[.$R336];[$JSON.$N$1];[.$T336];[$JSON.$O$1];IF(ISNA([.$V336]);&quot;null&quot;;[.$V336]);[$JSON.$P$1];[.$X336];[$JSON.$Q$1];[.$A336];[$JSON.$R$1];[.$B336];[$JSON.$S$1])" office:value-type="string" office:string-value="{&quot;id&quot;:&quot;4-27&quot;,&quot;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orderTable&quot;:336,&quot;orderDeck&quot;:131}," calcext:value-type="string">
            <text:p>{"id":"4-27","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G337];[$収録番号.$A$1:$収録番号.$B$9];2;0)" office:value-type="float" office:value="45" calcext:value-type="float">
            <text:p>45</text:p>
          </table:table-cell>
          <table:table-cell office:value-type="string" calcext:value-type="string">
            <text:p>R</text:p>
          </table:table-cell>
          <table:table-cell table:formula="of:=VLOOKUP([.I337];[$レアリティ番号.$A$1:$レアリティ番号.$B$4];2;0)" office:value-type="float" office:value="2" calcext:value-type="float">
            <text:p>2</text:p>
          </table:table-cell>
          <table:table-cell office:value-type="string" calcext:value-type="string">
            <text:p>イジン</text:p>
          </table:table-cell>
          <table:table-cell table:formula="of:=VLOOKUP([.K337];[$種類番号.$A$1:$種類番号.$B$4];2;0)" office:value-type="float" office:value="1" calcext:value-type="float">
            <text:p>1</text:p>
          </table:table-cell>
          <table:table-cell office:value-type="string" calcext:value-type="string">
            <text:p>緑</text:p>
          </table:table-cell>
          <table:table-cell table:formula="of:=VLOOKUP([.M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7];[$能力語番号.$A$1:$能力語番号.$B$10];2;0);0)" office:value-type="float" office:value="0" calcext:value-type="float">
            <text:p>0</text:p>
          </table:table-cell>
          <table:table-cell office:value-type="string" calcext:value-type="string">
            <text:p>美術</text:p>
          </table:table-cell>
          <table:table-cell table:formula="of:=IFERROR(VLOOKUP([.$S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office:value-type="float" office:value="1000" calcext:value-type="float">
            <text:p>1000</text:p>
          </table:table-cell>
          <table:table-cell table:style-name="ce8" office:value-type="string" calcext:value-type="string">
            <text:p>1ドローする</text:p>
          </table:table-cell>
          <table:table-cell table:formula="of:=IFERROR(VLOOKUP([.$W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IF(ISNA([.$S337]);&quot;null&quot;;&quot;&quot;&quot;&quot;&amp;[.$S337]&amp;&quot;&quot;&quot;&quot;);[$JSON.$E$1];[.$U337];[$JSON.$F$1];IF(ISNA([.$W337]);&quot;null&quot;;&quot;&quot;&quot;&quot;&amp;[.$W337]&amp;&quot;&quot;&quot;&quot;);[$JSON.$G$1];[.$Y337];[$JSON.$H$1];[.$H337];[$JSON.$I$1];[.J337];[$JSON.$J$1];[.$L337];[$JSON.$K$1];[.$O337];[$JSON.$L$1];[.$N337];[$JSON.$M$1];[.$R337];[$JSON.$N$1];[.$T337];[$JSON.$O$1];IF(ISNA([.$V337]);&quot;null&quot;;[.$V337]);[$JSON.$P$1];[.$X337];[$JSON.$Q$1];[.$A337];[$JSON.$R$1];[.$B337];[$JSON.$S$1])" office:value-type="string" office:string-value="{&quot;id&quot;:&quot;4-28&quot;,&quot;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orderTable&quot;:337,&quot;orderDeck&quot;:93}," calcext:value-type="string">
            <text:p>{"id":"4-28","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G338];[$収録番号.$A$1:$収録番号.$B$9];2;0)" office:value-type="float" office:value="45" calcext:value-type="float">
            <text:p>45</text:p>
          </table:table-cell>
          <table:table-cell office:value-type="string" calcext:value-type="string">
            <text:p>R</text:p>
          </table:table-cell>
          <table:table-cell table:formula="of:=VLOOKUP([.I338];[$レアリティ番号.$A$1:$レアリティ番号.$B$4];2;0)" office:value-type="float" office:value="2" calcext:value-type="float">
            <text:p>2</text:p>
          </table:table-cell>
          <table:table-cell office:value-type="string" calcext:value-type="string">
            <text:p>イジン</text:p>
          </table:table-cell>
          <table:table-cell table:formula="of:=VLOOKUP([.K338];[$種類番号.$A$1:$種類番号.$B$4];2;0)" office:value-type="float" office:value="1" calcext:value-type="float">
            <text:p>1</text:p>
          </table:table-cell>
          <table:table-cell office:value-type="string" calcext:value-type="string">
            <text:p>黄</text:p>
          </table:table-cell>
          <table:table-cell table:formula="of:=VLOOKUP([.M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office:value-type="float" office:value="1000" calcext:value-type="float">
            <text:p>1000</text:p>
          </table:table-cell>
          <table:table-cell table:style-name="ce8" office:value-type="string" calcext:value-type="string">
            <text:p>喪神</text:p>
          </table:table-cell>
          <table:table-cell table:formula="of:=IFERROR(VLOOKUP([.$W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IF(ISNA([.$S338]);&quot;null&quot;;&quot;&quot;&quot;&quot;&amp;[.$S338]&amp;&quot;&quot;&quot;&quot;);[$JSON.$E$1];[.$U338];[$JSON.$F$1];IF(ISNA([.$W338]);&quot;null&quot;;&quot;&quot;&quot;&quot;&amp;[.$W338]&amp;&quot;&quot;&quot;&quot;);[$JSON.$G$1];[.$Y338];[$JSON.$H$1];[.$H338];[$JSON.$I$1];[.J338];[$JSON.$J$1];[.$L338];[$JSON.$K$1];[.$O338];[$JSON.$L$1];[.$N338];[$JSON.$M$1];[.$R338];[$JSON.$N$1];[.$T338];[$JSON.$O$1];IF(ISNA([.$V338]);&quot;null&quot;;[.$V338]);[$JSON.$P$1];[.$X338];[$JSON.$Q$1];[.$A338];[$JSON.$R$1];[.$B338];[$JSON.$S$1])" office:value-type="string" office:string-value="{&quot;id&quot;:&quot;4-29&quot;,&quot;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orderTable&quot;:338,&quot;orderDeck&quot;:99}," calcext:value-type="string">
            <text:p>{"id":"4-29","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G339];[$収録番号.$A$1:$収録番号.$B$9];2;0)" office:value-type="float" office:value="45" calcext:value-type="float">
            <text:p>45</text:p>
          </table:table-cell>
          <table:table-cell office:value-type="string" calcext:value-type="string">
            <text:p>N</text:p>
          </table:table-cell>
          <table:table-cell table:formula="of:=VLOOKUP([.I339];[$レアリティ番号.$A$1:$レアリティ番号.$B$4];2;0)" office:value-type="float" office:value="1" calcext:value-type="float">
            <text:p>1</text:p>
          </table:table-cell>
          <table:table-cell office:value-type="string" calcext:value-type="string">
            <text:p>イジン</text:p>
          </table:table-cell>
          <table:table-cell table:formula="of:=VLOOKUP([.K339];[$種類番号.$A$1:$種類番号.$B$4];2;0)" office:value-type="float" office:value="1" calcext:value-type="float">
            <text:p>1</text:p>
          </table:table-cell>
          <table:table-cell office:value-type="string" calcext:value-type="string">
            <text:p>黄</text:p>
          </table:table-cell>
          <table:table-cell table:formula="of:=VLOOKUP([.M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office:value-type="float" office:value="1500" calcext:value-type="float">
            <text:p>1500</text:p>
          </table:table-cell>
          <table:table-cell table:style-name="ce8" office:value-type="string" calcext:value-type="string">
            <text:p>1ドローする</text:p>
          </table:table-cell>
          <table:table-cell table:formula="of:=IFERROR(VLOOKUP([.$W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IF(ISNA([.$S339]);&quot;null&quot;;&quot;&quot;&quot;&quot;&amp;[.$S339]&amp;&quot;&quot;&quot;&quot;);[$JSON.$E$1];[.$U339];[$JSON.$F$1];IF(ISNA([.$W339]);&quot;null&quot;;&quot;&quot;&quot;&quot;&amp;[.$W339]&amp;&quot;&quot;&quot;&quot;);[$JSON.$G$1];[.$Y339];[$JSON.$H$1];[.$H339];[$JSON.$I$1];[.J339];[$JSON.$J$1];[.$L339];[$JSON.$K$1];[.$O339];[$JSON.$L$1];[.$N339];[$JSON.$M$1];[.$R339];[$JSON.$N$1];[.$T339];[$JSON.$O$1];IF(ISNA([.$V339]);&quot;null&quot;;[.$V339]);[$JSON.$P$1];[.$X339];[$JSON.$Q$1];[.$A339];[$JSON.$R$1];[.$B339];[$JSON.$S$1])" office:value-type="string" office:string-value="{&quot;id&quot;:&quot;4-30&quot;,&quot;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orderTable&quot;:339,&quot;orderDeck&quot;:57}," calcext:value-type="string">
            <text:p>{"id":"4-30","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G340];[$収録番号.$A$1:$収録番号.$B$9];2;0)" office:value-type="float" office:value="45" calcext:value-type="float">
            <text:p>45</text:p>
          </table:table-cell>
          <table:table-cell office:value-type="string" calcext:value-type="string">
            <text:p>N</text:p>
          </table:table-cell>
          <table:table-cell table:formula="of:=VLOOKUP([.I340];[$レアリティ番号.$A$1:$レアリティ番号.$B$4];2;0)" office:value-type="float" office:value="1" calcext:value-type="float">
            <text:p>1</text:p>
          </table:table-cell>
          <table:table-cell office:value-type="string" calcext:value-type="string">
            <text:p>イジン</text:p>
          </table:table-cell>
          <table:table-cell table:formula="of:=VLOOKUP([.K340];[$種類番号.$A$1:$種類番号.$B$4];2;0)" office:value-type="float" office:value="1" calcext:value-type="float">
            <text:p>1</text:p>
          </table:table-cell>
          <table:table-cell office:value-type="string" calcext:value-type="string">
            <text:p>黄</text:p>
          </table:table-cell>
          <table:table-cell table:formula="of:=VLOOKUP([.M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0];[$能力語番号.$A$1:$能力語番号.$B$10];2;0);0)" office:value-type="float" office:value="0" calcext:value-type="float">
            <text:p>0</text:p>
          </table:table-cell>
          <table:table-cell office:value-type="string" calcext:value-type="string">
            <text:p>美術</text:p>
          </table:table-cell>
          <table:table-cell table:formula="of:=IFERROR(VLOOKUP([.$S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office:value-type="float" office:value="4500" calcext:value-type="float">
            <text:p>4500</text:p>
          </table:table-cell>
          <table:table-cell table:style-name="ce8" office:value-type="string" calcext:value-type="string">
            <text:p>1ドローする</text:p>
          </table:table-cell>
          <table:table-cell table:formula="of:=IFERROR(VLOOKUP([.$W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IF(ISNA([.$S340]);&quot;null&quot;;&quot;&quot;&quot;&quot;&amp;[.$S340]&amp;&quot;&quot;&quot;&quot;);[$JSON.$E$1];[.$U340];[$JSON.$F$1];IF(ISNA([.$W340]);&quot;null&quot;;&quot;&quot;&quot;&quot;&amp;[.$W340]&amp;&quot;&quot;&quot;&quot;);[$JSON.$G$1];[.$Y340];[$JSON.$H$1];[.$H340];[$JSON.$I$1];[.J340];[$JSON.$J$1];[.$L340];[$JSON.$K$1];[.$O340];[$JSON.$L$1];[.$N340];[$JSON.$M$1];[.$R340];[$JSON.$N$1];[.$T340];[$JSON.$O$1];IF(ISNA([.$V340]);&quot;null&quot;;[.$V340]);[$JSON.$P$1];[.$X340];[$JSON.$Q$1];[.$A340];[$JSON.$R$1];[.$B340];[$JSON.$S$1])" office:value-type="string" office:string-value="{&quot;id&quot;:&quot;4-31&quot;,&quot;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orderTable&quot;:340,&quot;orderDeck&quot;:176}," calcext:value-type="string">
            <text:p>{"id":"4-31","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G341];[$収録番号.$A$1:$収録番号.$B$9];2;0)" office:value-type="float" office:value="45" calcext:value-type="float">
            <text:p>45</text:p>
          </table:table-cell>
          <table:table-cell office:value-type="string" calcext:value-type="string">
            <text:p>N</text:p>
          </table:table-cell>
          <table:table-cell table:formula="of:=VLOOKUP([.I341];[$レアリティ番号.$A$1:$レアリティ番号.$B$4];2;0)" office:value-type="float" office:value="1" calcext:value-type="float">
            <text:p>1</text:p>
          </table:table-cell>
          <table:table-cell office:value-type="string" calcext:value-type="string">
            <text:p>イジン</text:p>
          </table:table-cell>
          <table:table-cell table:formula="of:=VLOOKUP([.K341];[$種類番号.$A$1:$種類番号.$B$4];2;0)" office:value-type="float" office:value="1" calcext:value-type="float">
            <text:p>1</text:p>
          </table:table-cell>
          <table:table-cell office:value-type="string" calcext:value-type="string">
            <text:p>黄</text:p>
          </table:table-cell>
          <table:table-cell table:formula="of:=VLOOKUP([.M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office:value-type="float" office:value="1500" calcext:value-type="float">
            <text:p>1500</text:p>
          </table:table-cell>
          <table:table-cell table:style-name="ce8" office:value-type="string" calcext:value-type="string">
            <text:p>1ドローする</text:p>
          </table:table-cell>
          <table:table-cell table:formula="of:=IFERROR(VLOOKUP([.$W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IF(ISNA([.$S341]);&quot;null&quot;;&quot;&quot;&quot;&quot;&amp;[.$S341]&amp;&quot;&quot;&quot;&quot;);[$JSON.$E$1];[.$U341];[$JSON.$F$1];IF(ISNA([.$W341]);&quot;null&quot;;&quot;&quot;&quot;&quot;&amp;[.$W341]&amp;&quot;&quot;&quot;&quot;);[$JSON.$G$1];[.$Y341];[$JSON.$H$1];[.$H341];[$JSON.$I$1];[.J341];[$JSON.$J$1];[.$L341];[$JSON.$K$1];[.$O341];[$JSON.$L$1];[.$N341];[$JSON.$M$1];[.$R341];[$JSON.$N$1];[.$T341];[$JSON.$O$1];IF(ISNA([.$V341]);&quot;null&quot;;[.$V341]);[$JSON.$P$1];[.$X341];[$JSON.$Q$1];[.$A341];[$JSON.$R$1];[.$B341];[$JSON.$S$1])" office:value-type="string" office:string-value="{&quot;id&quot;:&quot;4-32&quot;,&quot;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orderTable&quot;:341,&quot;orderDeck&quot;:100}," calcext:value-type="string">
            <text:p>{"id":"4-32","name":"滝沢馬琴","kana":"たきざわばきん","traitText":null,"ruleText":"執筆 - 黄のハイケイが戦場に置かれるたび、1ドローする。","legacyText":"1ドローする","imageUrl":"https://one-draw.jp/ijinden/cardlist/004/card/04_032.png","expansion":45,"rarity":1,"type":1,"level":3,"color":8,"term":2,"trait":0,"power":150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G342];[$収録番号.$A$1:$収録番号.$B$9];2;0)" office:value-type="float" office:value="45" calcext:value-type="float">
            <text:p>45</text:p>
          </table:table-cell>
          <table:table-cell office:value-type="string" calcext:value-type="string">
            <text:p>R</text:p>
          </table:table-cell>
          <table:table-cell table:formula="of:=VLOOKUP([.I342];[$レアリティ番号.$A$1:$レアリティ番号.$B$4];2;0)" office:value-type="float" office:value="2" calcext:value-type="float">
            <text:p>2</text:p>
          </table:table-cell>
          <table:table-cell office:value-type="string" calcext:value-type="string">
            <text:p>イジン</text:p>
          </table:table-cell>
          <table:table-cell table:formula="of:=VLOOKUP([.K342];[$種類番号.$A$1:$種類番号.$B$4];2;0)" office:value-type="float" office:value="1" calcext:value-type="float">
            <text:p>1</text:p>
          </table:table-cell>
          <table:table-cell office:value-type="string" calcext:value-type="string">
            <text:p>黄</text:p>
          </table:table-cell>
          <table:table-cell table:formula="of:=VLOOKUP([.M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office:value-type="float" office:value="5500" calcext:value-type="float">
            <text:p>5500</text:p>
          </table:table-cell>
          <table:table-cell table:style-name="ce8" office:value-type="string" calcext:value-type="string">
            <text:p>木霊</text:p>
          </table:table-cell>
          <table:table-cell table:formula="of:=IFERROR(VLOOKUP([.$W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IF(ISNA([.$S342]);&quot;null&quot;;&quot;&quot;&quot;&quot;&amp;[.$S342]&amp;&quot;&quot;&quot;&quot;);[$JSON.$E$1];[.$U342];[$JSON.$F$1];IF(ISNA([.$W342]);&quot;null&quot;;&quot;&quot;&quot;&quot;&amp;[.$W342]&amp;&quot;&quot;&quot;&quot;);[$JSON.$G$1];[.$Y342];[$JSON.$H$1];[.$H342];[$JSON.$I$1];[.J342];[$JSON.$J$1];[.$L342];[$JSON.$K$1];[.$O342];[$JSON.$L$1];[.$N342];[$JSON.$M$1];[.$R342];[$JSON.$N$1];[.$T342];[$JSON.$O$1];IF(ISNA([.$V342]);&quot;null&quot;;[.$V342]);[$JSON.$P$1];[.$X342];[$JSON.$Q$1];[.$A342];[$JSON.$R$1];[.$B342];[$JSON.$S$1])" office:value-type="string" office:string-value="{&quot;id&quot;:&quot;4-33&quot;,&quot;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orderTable&quot;:342,&quot;orderDeck&quot;:199}," calcext:value-type="string">
            <text:p>{"id":"4-33","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G343];[$収録番号.$A$1:$収録番号.$B$9];2;0)" office:value-type="float" office:value="45" calcext:value-type="float">
            <text:p>45</text:p>
          </table:table-cell>
          <table:table-cell office:value-type="string" calcext:value-type="string">
            <text:p>N</text:p>
          </table:table-cell>
          <table:table-cell table:formula="of:=VLOOKUP([.I343];[$レアリティ番号.$A$1:$レアリティ番号.$B$4];2;0)" office:value-type="float" office:value="1" calcext:value-type="float">
            <text:p>1</text:p>
          </table:table-cell>
          <table:table-cell office:value-type="string" calcext:value-type="string">
            <text:p>イジン</text:p>
          </table:table-cell>
          <table:table-cell table:formula="of:=VLOOKUP([.K343];[$種類番号.$A$1:$種類番号.$B$4];2;0)" office:value-type="float" office:value="1" calcext:value-type="float">
            <text:p>1</text:p>
          </table:table-cell>
          <table:table-cell office:value-type="string" calcext:value-type="string">
            <text:p>黄</text:p>
          </table:table-cell>
          <table:table-cell table:formula="of:=VLOOKUP([.M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office:value-type="float" office:value="3500" calcext:value-type="float">
            <text:p>3500</text:p>
          </table:table-cell>
          <table:table-cell table:style-name="ce8" office:value-type="string" calcext:value-type="string">
            <text:p>1ドローする</text:p>
          </table:table-cell>
          <table:table-cell table:formula="of:=IFERROR(VLOOKUP([.$W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IF(ISNA([.$S343]);&quot;null&quot;;&quot;&quot;&quot;&quot;&amp;[.$S343]&amp;&quot;&quot;&quot;&quot;);[$JSON.$E$1];[.$U343];[$JSON.$F$1];IF(ISNA([.$W343]);&quot;null&quot;;&quot;&quot;&quot;&quot;&amp;[.$W343]&amp;&quot;&quot;&quot;&quot;);[$JSON.$G$1];[.$Y343];[$JSON.$H$1];[.$H343];[$JSON.$I$1];[.J343];[$JSON.$J$1];[.$L343];[$JSON.$K$1];[.$O343];[$JSON.$L$1];[.$N343];[$JSON.$M$1];[.$R343];[$JSON.$N$1];[.$T343];[$JSON.$O$1];IF(ISNA([.$V343]);&quot;null&quot;;[.$V343]);[$JSON.$P$1];[.$X343];[$JSON.$Q$1];[.$A343];[$JSON.$R$1];[.$B343];[$JSON.$S$1])" office:value-type="string" office:string-value="{&quot;id&quot;:&quot;4-34&quot;,&quot;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orderTable&quot;:343,&quot;orderDeck&quot;:138}," calcext:value-type="string">
            <text:p>{"id":"4-34","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G344];[$収録番号.$A$1:$収録番号.$B$9];2;0)" office:value-type="float" office:value="45" calcext:value-type="float">
            <text:p>45</text:p>
          </table:table-cell>
          <table:table-cell office:value-type="string" calcext:value-type="string">
            <text:p>R</text:p>
          </table:table-cell>
          <table:table-cell table:formula="of:=VLOOKUP([.I344];[$レアリティ番号.$A$1:$レアリティ番号.$B$4];2;0)" office:value-type="float" office:value="2" calcext:value-type="float">
            <text:p>2</text:p>
          </table:table-cell>
          <table:table-cell office:value-type="string" calcext:value-type="string">
            <text:p>イジン</text:p>
          </table:table-cell>
          <table:table-cell table:formula="of:=VLOOKUP([.K344];[$種類番号.$A$1:$種類番号.$B$4];2;0)" office:value-type="float" office:value="1" calcext:value-type="float">
            <text:p>1</text:p>
          </table:table-cell>
          <table:table-cell office:value-type="string" calcext:value-type="string">
            <text:p>紫</text:p>
          </table:table-cell>
          <table:table-cell table:formula="of:=VLOOKUP([.M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4];[$能力語番号.$A$1:$能力語番号.$B$10];2;0);0)" office:value-type="float" office:value="0" calcext:value-type="float">
            <text:p>0</text:p>
          </table:table-cell>
          <table:table-cell office:value-type="string" calcext:value-type="string">
            <text:p>剣術 志願</text:p>
          </table:table-cell>
          <table:table-cell table:formula="of:=IFERROR(VLOOKUP([.$S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office:value-type="float" office:value="2000" calcext:value-type="float">
            <text:p>2000</text:p>
          </table:table-cell>
          <table:table-cell table:style-name="ce8" office:value-type="string" calcext:value-type="string">
            <text:p>1ドローする</text:p>
          </table:table-cell>
          <table:table-cell table:formula="of:=IFERROR(VLOOKUP([.$W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IF(ISNA([.$S344]);&quot;null&quot;;&quot;&quot;&quot;&quot;&amp;[.$S344]&amp;&quot;&quot;&quot;&quot;);[$JSON.$E$1];[.$U344];[$JSON.$F$1];IF(ISNA([.$W344]);&quot;null&quot;;&quot;&quot;&quot;&quot;&amp;[.$W344]&amp;&quot;&quot;&quot;&quot;);[$JSON.$G$1];[.$Y344];[$JSON.$H$1];[.$H344];[$JSON.$I$1];[.J344];[$JSON.$J$1];[.$L344];[$JSON.$K$1];[.$O344];[$JSON.$L$1];[.$N344];[$JSON.$M$1];[.$R344];[$JSON.$N$1];[.$T344];[$JSON.$O$1];IF(ISNA([.$V344]);&quot;null&quot;;[.$V344]);[$JSON.$P$1];[.$X344];[$JSON.$Q$1];[.$A344];[$JSON.$R$1];[.$B344];[$JSON.$S$1])" office:value-type="string" office:string-value="{&quot;id&quot;:&quot;4-35&quot;,&quot;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orderTable&quot;:344,&quot;orderDeck&quot;:61}," calcext:value-type="string">
            <text:p>{"id":"4-35","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G345];[$収録番号.$A$1:$収録番号.$B$9];2;0)" office:value-type="float" office:value="45" calcext:value-type="float">
            <text:p>45</text:p>
          </table:table-cell>
          <table:table-cell office:value-type="string" calcext:value-type="string">
            <text:p>N</text:p>
          </table:table-cell>
          <table:table-cell table:formula="of:=VLOOKUP([.I345];[$レアリティ番号.$A$1:$レアリティ番号.$B$4];2;0)" office:value-type="float" office:value="1" calcext:value-type="float">
            <text:p>1</text:p>
          </table:table-cell>
          <table:table-cell office:value-type="string" calcext:value-type="string">
            <text:p>イジン</text:p>
          </table:table-cell>
          <table:table-cell table:formula="of:=VLOOKUP([.K345];[$種類番号.$A$1:$種類番号.$B$4];2;0)" office:value-type="float" office:value="1" calcext:value-type="float">
            <text:p>1</text:p>
          </table:table-cell>
          <table:table-cell office:value-type="string" calcext:value-type="string">
            <text:p>紫</text:p>
          </table:table-cell>
          <table:table-cell table:formula="of:=VLOOKUP([.M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IF(ISNA([.$S345]);&quot;null&quot;;&quot;&quot;&quot;&quot;&amp;[.$S345]&amp;&quot;&quot;&quot;&quot;);[$JSON.$E$1];[.$U345];[$JSON.$F$1];IF(ISNA([.$W345]);&quot;null&quot;;&quot;&quot;&quot;&quot;&amp;[.$W345]&amp;&quot;&quot;&quot;&quot;);[$JSON.$G$1];[.$Y345];[$JSON.$H$1];[.$H345];[$JSON.$I$1];[.J345];[$JSON.$J$1];[.$L345];[$JSON.$K$1];[.$O345];[$JSON.$L$1];[.$N345];[$JSON.$M$1];[.$R345];[$JSON.$N$1];[.$T345];[$JSON.$O$1];IF(ISNA([.$V345]);&quot;null&quot;;[.$V345]);[$JSON.$P$1];[.$X345];[$JSON.$Q$1];[.$A345];[$JSON.$R$1];[.$B345];[$JSON.$S$1])" office:value-type="string" office:string-value="{&quot;id&quot;:&quot;4-36&quot;,&quot;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orderTable&quot;:345,&quot;orderDeck&quot;:23}," calcext:value-type="string">
            <text:p>{"id":"4-36","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G346];[$収録番号.$A$1:$収録番号.$B$9];2;0)" office:value-type="float" office:value="45" calcext:value-type="float">
            <text:p>45</text:p>
          </table:table-cell>
          <table:table-cell office:value-type="string" calcext:value-type="string">
            <text:p>R</text:p>
          </table:table-cell>
          <table:table-cell table:formula="of:=VLOOKUP([.I346];[$レアリティ番号.$A$1:$レアリティ番号.$B$4];2;0)" office:value-type="float" office:value="2" calcext:value-type="float">
            <text:p>2</text:p>
          </table:table-cell>
          <table:table-cell office:value-type="string" calcext:value-type="string">
            <text:p>イジン</text:p>
          </table:table-cell>
          <table:table-cell table:formula="of:=VLOOKUP([.K346];[$種類番号.$A$1:$種類番号.$B$4];2;0)" office:value-type="float" office:value="1" calcext:value-type="float">
            <text:p>1</text:p>
          </table:table-cell>
          <table:table-cell office:value-type="string" calcext:value-type="string">
            <text:p>紫</text:p>
          </table:table-cell>
          <table:table-cell table:formula="of:=VLOOKUP([.M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6];[$能力語番号.$A$1:$能力語番号.$B$10];2;0);0)" office:value-type="float" office:value="0" calcext:value-type="float">
            <text:p>0</text:p>
          </table:table-cell>
          <table:table-cell office:value-type="string" calcext:value-type="string">
            <text:p>医術</text:p>
          </table:table-cell>
          <table:table-cell table:formula="of:=IFERROR(VLOOKUP([.$S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office:value-type="float" office:value="0" calcext:value-type="float">
            <text:p>0</text:p>
          </table:table-cell>
          <table:table-cell table:style-name="ce8" office:value-type="string" calcext:value-type="string">
            <text:p>反魂</text:p>
          </table:table-cell>
          <table:table-cell table:formula="of:=IFERROR(VLOOKUP([.$W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IF(ISNA([.$S346]);&quot;null&quot;;&quot;&quot;&quot;&quot;&amp;[.$S346]&amp;&quot;&quot;&quot;&quot;);[$JSON.$E$1];[.$U346];[$JSON.$F$1];IF(ISNA([.$W346]);&quot;null&quot;;&quot;&quot;&quot;&quot;&amp;[.$W346]&amp;&quot;&quot;&quot;&quot;);[$JSON.$G$1];[.$Y346];[$JSON.$H$1];[.$H346];[$JSON.$I$1];[.J346];[$JSON.$J$1];[.$L346];[$JSON.$K$1];[.$O346];[$JSON.$L$1];[.$N346];[$JSON.$M$1];[.$R346];[$JSON.$N$1];[.$T346];[$JSON.$O$1];IF(ISNA([.$V346]);&quot;null&quot;;[.$V346]);[$JSON.$P$1];[.$X346];[$JSON.$Q$1];[.$A346];[$JSON.$R$1];[.$B346];[$JSON.$S$1])" office:value-type="string" office:string-value="{&quot;id&quot;:&quot;4-37&quot;,&quot;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orderTable&quot;:346,&quot;orderDeck&quot;:62}," calcext:value-type="string">
            <text:p>{"id":"4-37","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G347];[$収録番号.$A$1:$収録番号.$B$9];2;0)" office:value-type="float" office:value="45" calcext:value-type="float">
            <text:p>45</text:p>
          </table:table-cell>
          <table:table-cell office:value-type="string" calcext:value-type="string">
            <text:p>N</text:p>
          </table:table-cell>
          <table:table-cell table:formula="of:=VLOOKUP([.I347];[$レアリティ番号.$A$1:$レアリティ番号.$B$4];2;0)" office:value-type="float" office:value="1" calcext:value-type="float">
            <text:p>1</text:p>
          </table:table-cell>
          <table:table-cell office:value-type="string" calcext:value-type="string">
            <text:p>イジン</text:p>
          </table:table-cell>
          <table:table-cell table:formula="of:=VLOOKUP([.K347];[$種類番号.$A$1:$種類番号.$B$4];2;0)" office:value-type="float" office:value="1" calcext:value-type="float">
            <text:p>1</text:p>
          </table:table-cell>
          <table:table-cell office:value-type="string" calcext:value-type="string">
            <text:p>紫</text:p>
          </table:table-cell>
          <table:table-cell table:formula="of:=VLOOKUP([.M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7];[$能力語番号.$A$1:$能力語番号.$B$10];2;0);0)" office:value-type="float" office:value="0" calcext:value-type="float">
            <text:p>0</text:p>
          </table:table-cell>
          <table:table-cell office:value-type="string" calcext:value-type="string">
            <text:p>医術</text:p>
          </table:table-cell>
          <table:table-cell table:formula="of:=IFERROR(VLOOKUP([.$S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office:value-type="float" office:value="5000" calcext:value-type="float">
            <text:p>5000</text:p>
          </table:table-cell>
          <table:table-cell table:style-name="ce8" office:value-type="string" calcext:value-type="string">
            <text:p>1ドローする</text:p>
          </table:table-cell>
          <table:table-cell table:formula="of:=IFERROR(VLOOKUP([.$W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IF(ISNA([.$S347]);&quot;null&quot;;&quot;&quot;&quot;&quot;&amp;[.$S347]&amp;&quot;&quot;&quot;&quot;);[$JSON.$E$1];[.$U347];[$JSON.$F$1];IF(ISNA([.$W347]);&quot;null&quot;;&quot;&quot;&quot;&quot;&amp;[.$W347]&amp;&quot;&quot;&quot;&quot;);[$JSON.$G$1];[.$Y347];[$JSON.$H$1];[.$H347];[$JSON.$I$1];[.J347];[$JSON.$J$1];[.$L347];[$JSON.$K$1];[.$O347];[$JSON.$L$1];[.$N347];[$JSON.$M$1];[.$R347];[$JSON.$N$1];[.$T347];[$JSON.$O$1];IF(ISNA([.$V347]);&quot;null&quot;;[.$V347]);[$JSON.$P$1];[.$X347];[$JSON.$Q$1];[.$A347];[$JSON.$R$1];[.$B347];[$JSON.$S$1])" office:value-type="string" office:string-value="{&quot;id&quot;:&quot;4-38&quot;,&quot;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orderTable&quot;:347,&quot;orderDeck&quot;:179}," calcext:value-type="string">
            <text:p>{"id":"4-38","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G348];[$収録番号.$A$1:$収録番号.$B$9];2;0)" office:value-type="float" office:value="45" calcext:value-type="float">
            <text:p>45</text:p>
          </table:table-cell>
          <table:table-cell office:value-type="string" calcext:value-type="string">
            <text:p>N</text:p>
          </table:table-cell>
          <table:table-cell table:formula="of:=VLOOKUP([.I348];[$レアリティ番号.$A$1:$レアリティ番号.$B$4];2;0)" office:value-type="float" office:value="1" calcext:value-type="float">
            <text:p>1</text:p>
          </table:table-cell>
          <table:table-cell office:value-type="string" calcext:value-type="string">
            <text:p>イジン</text:p>
          </table:table-cell>
          <table:table-cell table:formula="of:=VLOOKUP([.K348];[$種類番号.$A$1:$種類番号.$B$4];2;0)" office:value-type="float" office:value="1" calcext:value-type="float">
            <text:p>1</text:p>
          </table:table-cell>
          <table:table-cell office:value-type="string" calcext:value-type="string">
            <text:p>紫</text:p>
          </table:table-cell>
          <table:table-cell table:formula="of:=VLOOKUP([.M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office:value-type="float" office:value="1000" calcext:value-type="float">
            <text:p>1000</text:p>
          </table:table-cell>
          <table:table-cell table:style-name="ce8" table:formula="of:=NA()" office:value-type="string" office:string-value="" calcext:value-type="error">
            <text:p>#N/A</text:p>
          </table:table-cell>
          <table:table-cell table:formula="of:=IFERROR(VLOOKUP([.$W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IF(ISNA([.$S348]);&quot;null&quot;;&quot;&quot;&quot;&quot;&amp;[.$S348]&amp;&quot;&quot;&quot;&quot;);[$JSON.$E$1];[.$U348];[$JSON.$F$1];IF(ISNA([.$W348]);&quot;null&quot;;&quot;&quot;&quot;&quot;&amp;[.$W348]&amp;&quot;&quot;&quot;&quot;);[$JSON.$G$1];[.$Y348];[$JSON.$H$1];[.$H348];[$JSON.$I$1];[.J348];[$JSON.$J$1];[.$L348];[$JSON.$K$1];[.$O348];[$JSON.$L$1];[.$N348];[$JSON.$M$1];[.$R348];[$JSON.$N$1];[.$T348];[$JSON.$O$1];IF(ISNA([.$V348]);&quot;null&quot;;[.$V348]);[$JSON.$P$1];[.$X348];[$JSON.$Q$1];[.$A348];[$JSON.$R$1];[.$B348];[$JSON.$S$1])" office:value-type="string" office:string-value="{&quot;id&quot;:&quot;4-39&quot;,&quot;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orderTable&quot;:348,&quot;orderDeck&quot;:105}," calcext:value-type="string">
            <text:p>{"id":"4-39","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G349];[$収録番号.$A$1:$収録番号.$B$9];2;0)" office:value-type="float" office:value="45" calcext:value-type="float">
            <text:p>45</text:p>
          </table:table-cell>
          <table:table-cell office:value-type="string" calcext:value-type="string">
            <text:p>N</text:p>
          </table:table-cell>
          <table:table-cell table:formula="of:=VLOOKUP([.I349];[$レアリティ番号.$A$1:$レアリティ番号.$B$4];2;0)" office:value-type="float" office:value="1" calcext:value-type="float">
            <text:p>1</text:p>
          </table:table-cell>
          <table:table-cell office:value-type="string" calcext:value-type="string">
            <text:p>イジン</text:p>
          </table:table-cell>
          <table:table-cell table:formula="of:=VLOOKUP([.K349];[$種類番号.$A$1:$種類番号.$B$4];2;0)" office:value-type="float" office:value="1" calcext:value-type="float">
            <text:p>1</text:p>
          </table:table-cell>
          <table:table-cell office:value-type="string" calcext:value-type="string">
            <text:p>紫</text:p>
          </table:table-cell>
          <table:table-cell table:formula="of:=VLOOKUP([.M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Q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S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office:value-type="float" office:value="5000" calcext:value-type="float">
            <text:p>5000</text:p>
          </table:table-cell>
          <table:table-cell table:style-name="ce8" table:formula="of:=NA()" office:value-type="string" office:string-value="" calcext:value-type="error">
            <text:p>#N/A</text:p>
          </table:table-cell>
          <table:table-cell table:formula="of:=IFERROR(VLOOKUP([.$W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IF(ISNA([.$S349]);&quot;null&quot;;&quot;&quot;&quot;&quot;&amp;[.$S349]&amp;&quot;&quot;&quot;&quot;);[$JSON.$E$1];[.$U349];[$JSON.$F$1];IF(ISNA([.$W349]);&quot;null&quot;;&quot;&quot;&quot;&quot;&amp;[.$W349]&amp;&quot;&quot;&quot;&quot;);[$JSON.$G$1];[.$Y349];[$JSON.$H$1];[.$H349];[$JSON.$I$1];[.J349];[$JSON.$J$1];[.$L349];[$JSON.$K$1];[.$O349];[$JSON.$L$1];[.$N349];[$JSON.$M$1];[.$R349];[$JSON.$N$1];[.$T349];[$JSON.$O$1];IF(ISNA([.$V349]);&quot;null&quot;;[.$V349]);[$JSON.$P$1];[.$X349];[$JSON.$Q$1];[.$A349];[$JSON.$R$1];[.$B349];[$JSON.$S$1])" office:value-type="string" office:string-value="{&quot;id&quot;:&quot;4-40&quot;,&quot;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orderTable&quot;:349,&quot;orderDeck&quot;:202}," calcext:value-type="string">
            <text:p>{"id":"4-40","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G350];[$収録番号.$A$1:$収録番号.$B$9];2;0)" office:value-type="float" office:value="45" calcext:value-type="float">
            <text:p>45</text:p>
          </table:table-cell>
          <table:table-cell office:value-type="string" calcext:value-type="string">
            <text:p>N</text:p>
          </table:table-cell>
          <table:table-cell table:formula="of:=VLOOKUP([.I350];[$レアリティ番号.$A$1:$レアリティ番号.$B$4];2;0)" office:value-type="float" office:value="1" calcext:value-type="float">
            <text:p>1</text:p>
          </table:table-cell>
          <table:table-cell office:value-type="string" calcext:value-type="string">
            <text:p>ハイケイ</text:p>
          </table:table-cell>
          <table:table-cell table:formula="of:=VLOOKUP([.K350];[$種類番号.$A$1:$種類番号.$B$4];2;0)" office:value-type="float" office:value="2" calcext:value-type="float">
            <text:p>2</text:p>
          </table:table-cell>
          <table:table-cell office:value-type="string" calcext:value-type="string">
            <text:p>赤</text:p>
          </table:table-cell>
          <table:table-cell table:formula="of:=VLOOKUP([.M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formula="of:=NA()" office:value-type="string" office:string-value="" calcext:value-type="error">
            <text:p>#N/A</text:p>
          </table:table-cell>
          <table:table-cell table:style-name="ce8" office:value-type="string" calcext:value-type="string">
            <text:p>1ドローする</text:p>
          </table:table-cell>
          <table:table-cell table:formula="of:=IFERROR(VLOOKUP([.$W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IF(ISNA([.$S350]);&quot;null&quot;;&quot;&quot;&quot;&quot;&amp;[.$S350]&amp;&quot;&quot;&quot;&quot;);[$JSON.$E$1];[.$U350];[$JSON.$F$1];IF(ISNA([.$W350]);&quot;null&quot;;&quot;&quot;&quot;&quot;&amp;[.$W350]&amp;&quot;&quot;&quot;&quot;);[$JSON.$G$1];[.$Y350];[$JSON.$H$1];[.$H350];[$JSON.$I$1];[.J350];[$JSON.$J$1];[.$L350];[$JSON.$K$1];[.$O350];[$JSON.$L$1];[.$N350];[$JSON.$M$1];[.$R350];[$JSON.$N$1];[.$T350];[$JSON.$O$1];IF(ISNA([.$V350]);&quot;null&quot;;[.$V350]);[$JSON.$P$1];[.$X350];[$JSON.$Q$1];[.$A350];[$JSON.$R$1];[.$B350];[$JSON.$S$1])" office:value-type="string" office:string-value="{&quot;id&quot;:&quot;4-41&quot;,&quot;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orderTable&quot;:350,&quot;orderDeck&quot;:250}," calcext:value-type="string">
            <text:p>{"id":"4-41","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G351];[$収録番号.$A$1:$収録番号.$B$9];2;0)" office:value-type="float" office:value="45" calcext:value-type="float">
            <text:p>45</text:p>
          </table:table-cell>
          <table:table-cell office:value-type="string" calcext:value-type="string">
            <text:p>N</text:p>
          </table:table-cell>
          <table:table-cell table:formula="of:=VLOOKUP([.I351];[$レアリティ番号.$A$1:$レアリティ番号.$B$4];2;0)" office:value-type="float" office:value="1" calcext:value-type="float">
            <text:p>1</text:p>
          </table:table-cell>
          <table:table-cell office:value-type="string" calcext:value-type="string">
            <text:p>ハイケイ</text:p>
          </table:table-cell>
          <table:table-cell table:formula="of:=VLOOKUP([.K351];[$種類番号.$A$1:$種類番号.$B$4];2;0)" office:value-type="float" office:value="2" calcext:value-type="float">
            <text:p>2</text:p>
          </table:table-cell>
          <table:table-cell office:value-type="string" calcext:value-type="string">
            <text:p>赤</text:p>
          </table:table-cell>
          <table:table-cell table:formula="of:=VLOOKUP([.M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IF(ISNA([.$S351]);&quot;null&quot;;&quot;&quot;&quot;&quot;&amp;[.$S351]&amp;&quot;&quot;&quot;&quot;);[$JSON.$E$1];[.$U351];[$JSON.$F$1];IF(ISNA([.$W351]);&quot;null&quot;;&quot;&quot;&quot;&quot;&amp;[.$W351]&amp;&quot;&quot;&quot;&quot;);[$JSON.$G$1];[.$Y351];[$JSON.$H$1];[.$H351];[$JSON.$I$1];[.J351];[$JSON.$J$1];[.$L351];[$JSON.$K$1];[.$O351];[$JSON.$L$1];[.$N351];[$JSON.$M$1];[.$R351];[$JSON.$N$1];[.$T351];[$JSON.$O$1];IF(ISNA([.$V351]);&quot;null&quot;;[.$V351]);[$JSON.$P$1];[.$X351];[$JSON.$Q$1];[.$A351];[$JSON.$R$1];[.$B351];[$JSON.$S$1])" office:value-type="string" office:string-value="{&quot;id&quot;:&quot;4-42&quot;,&quot;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orderTable&quot;:351,&quot;orderDeck&quot;:241}," calcext:value-type="string">
            <text:p>{"id":"4-42","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G352];[$収録番号.$A$1:$収録番号.$B$9];2;0)" office:value-type="float" office:value="45" calcext:value-type="float">
            <text:p>45</text:p>
          </table:table-cell>
          <table:table-cell office:value-type="string" calcext:value-type="string">
            <text:p>N</text:p>
          </table:table-cell>
          <table:table-cell table:formula="of:=VLOOKUP([.I352];[$レアリティ番号.$A$1:$レアリティ番号.$B$4];2;0)" office:value-type="float" office:value="1" calcext:value-type="float">
            <text:p>1</text:p>
          </table:table-cell>
          <table:table-cell office:value-type="string" calcext:value-type="string">
            <text:p>ハイケイ</text:p>
          </table:table-cell>
          <table:table-cell table:formula="of:=VLOOKUP([.K352];[$種類番号.$A$1:$種類番号.$B$4];2;0)" office:value-type="float" office:value="2" calcext:value-type="float">
            <text:p>2</text:p>
          </table:table-cell>
          <table:table-cell office:value-type="string" calcext:value-type="string">
            <text:p>青</text:p>
          </table:table-cell>
          <table:table-cell table:formula="of:=VLOOKUP([.M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IF(ISNA([.$S352]);&quot;null&quot;;&quot;&quot;&quot;&quot;&amp;[.$S352]&amp;&quot;&quot;&quot;&quot;);[$JSON.$E$1];[.$U352];[$JSON.$F$1];IF(ISNA([.$W352]);&quot;null&quot;;&quot;&quot;&quot;&quot;&amp;[.$W352]&amp;&quot;&quot;&quot;&quot;);[$JSON.$G$1];[.$Y352];[$JSON.$H$1];[.$H352];[$JSON.$I$1];[.J352];[$JSON.$J$1];[.$L352];[$JSON.$K$1];[.$O352];[$JSON.$L$1];[.$N352];[$JSON.$M$1];[.$R352];[$JSON.$N$1];[.$T352];[$JSON.$O$1];IF(ISNA([.$V352]);&quot;null&quot;;[.$V352]);[$JSON.$P$1];[.$X352];[$JSON.$Q$1];[.$A352];[$JSON.$R$1];[.$B352];[$JSON.$S$1])" office:value-type="string" office:string-value="{&quot;id&quot;:&quot;4-43&quot;,&quot;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orderTable&quot;:352,&quot;orderDeck&quot;:238}," calcext:value-type="string">
            <text:p>{"id":"4-43","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G353];[$収録番号.$A$1:$収録番号.$B$9];2;0)" office:value-type="float" office:value="45" calcext:value-type="float">
            <text:p>45</text:p>
          </table:table-cell>
          <table:table-cell office:value-type="string" calcext:value-type="string">
            <text:p>N</text:p>
          </table:table-cell>
          <table:table-cell table:formula="of:=VLOOKUP([.I353];[$レアリティ番号.$A$1:$レアリティ番号.$B$4];2;0)" office:value-type="float" office:value="1" calcext:value-type="float">
            <text:p>1</text:p>
          </table:table-cell>
          <table:table-cell office:value-type="string" calcext:value-type="string">
            <text:p>ハイケイ</text:p>
          </table:table-cell>
          <table:table-cell table:formula="of:=VLOOKUP([.K353];[$種類番号.$A$1:$種類番号.$B$4];2;0)" office:value-type="float" office:value="2" calcext:value-type="float">
            <text:p>2</text:p>
          </table:table-cell>
          <table:table-cell office:value-type="string" calcext:value-type="string">
            <text:p>青</text:p>
          </table:table-cell>
          <table:table-cell table:formula="of:=VLOOKUP([.M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3];[$能力語番号.$A$1:$能力語番号.$B$10];2;0);0)" office:value-type="float" office:value="0" calcext:value-type="float">
            <text:p>0</text:p>
          </table:table-cell>
          <table:table-cell office:value-type="string" calcext:value-type="string">
            <text:p>美術 思想</text:p>
          </table:table-cell>
          <table:table-cell table:formula="of:=IFERROR(VLOOKUP([.$S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IF(ISNA([.$S353]);&quot;null&quot;;&quot;&quot;&quot;&quot;&amp;[.$S353]&amp;&quot;&quot;&quot;&quot;);[$JSON.$E$1];[.$U353];[$JSON.$F$1];IF(ISNA([.$W353]);&quot;null&quot;;&quot;&quot;&quot;&quot;&amp;[.$W353]&amp;&quot;&quot;&quot;&quot;);[$JSON.$G$1];[.$Y353];[$JSON.$H$1];[.$H353];[$JSON.$I$1];[.J353];[$JSON.$J$1];[.$L353];[$JSON.$K$1];[.$O353];[$JSON.$L$1];[.$N353];[$JSON.$M$1];[.$R353];[$JSON.$N$1];[.$T353];[$JSON.$O$1];IF(ISNA([.$V353]);&quot;null&quot;;[.$V353]);[$JSON.$P$1];[.$X353];[$JSON.$Q$1];[.$A353];[$JSON.$R$1];[.$B353];[$JSON.$S$1])" office:value-type="string" office:string-value="{&quot;id&quot;:&quot;4-44&quot;,&quot;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orderTable&quot;:353,&quot;orderDeck&quot;:275}," calcext:value-type="string">
            <text:p>{"id":"4-44","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G354];[$収録番号.$A$1:$収録番号.$B$9];2;0)" office:value-type="float" office:value="45" calcext:value-type="float">
            <text:p>45</text:p>
          </table:table-cell>
          <table:table-cell office:value-type="string" calcext:value-type="string">
            <text:p>N</text:p>
          </table:table-cell>
          <table:table-cell table:formula="of:=VLOOKUP([.I354];[$レアリティ番号.$A$1:$レアリティ番号.$B$4];2;0)" office:value-type="float" office:value="1" calcext:value-type="float">
            <text:p>1</text:p>
          </table:table-cell>
          <table:table-cell office:value-type="string" calcext:value-type="string">
            <text:p>ハイケイ</text:p>
          </table:table-cell>
          <table:table-cell table:formula="of:=VLOOKUP([.K354];[$種類番号.$A$1:$種類番号.$B$4];2;0)" office:value-type="float" office:value="2" calcext:value-type="float">
            <text:p>2</text:p>
          </table:table-cell>
          <table:table-cell office:value-type="string" calcext:value-type="string">
            <text:p>緑</text:p>
          </table:table-cell>
          <table:table-cell table:formula="of:=VLOOKUP([.M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IF(ISNA([.$S354]);&quot;null&quot;;&quot;&quot;&quot;&quot;&amp;[.$S354]&amp;&quot;&quot;&quot;&quot;);[$JSON.$E$1];[.$U354];[$JSON.$F$1];IF(ISNA([.$W354]);&quot;null&quot;;&quot;&quot;&quot;&quot;&amp;[.$W354]&amp;&quot;&quot;&quot;&quot;);[$JSON.$G$1];[.$Y354];[$JSON.$H$1];[.$H354];[$JSON.$I$1];[.J354];[$JSON.$J$1];[.$L354];[$JSON.$K$1];[.$O354];[$JSON.$L$1];[.$N354];[$JSON.$M$1];[.$R354];[$JSON.$N$1];[.$T354];[$JSON.$O$1];IF(ISNA([.$V354]);&quot;null&quot;;[.$V354]);[$JSON.$P$1];[.$X354];[$JSON.$Q$1];[.$A354];[$JSON.$R$1];[.$B354];[$JSON.$S$1])" office:value-type="string" office:string-value="{&quot;id&quot;:&quot;4-45&quot;,&quot;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orderTable&quot;:354,&quot;orderDeck&quot;:254}," calcext:value-type="string">
            <text:p>{"id":"4-45","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G355];[$収録番号.$A$1:$収録番号.$B$9];2;0)" office:value-type="float" office:value="45" calcext:value-type="float">
            <text:p>45</text:p>
          </table:table-cell>
          <table:table-cell office:value-type="string" calcext:value-type="string">
            <text:p>N</text:p>
          </table:table-cell>
          <table:table-cell table:formula="of:=VLOOKUP([.I355];[$レアリティ番号.$A$1:$レアリティ番号.$B$4];2;0)" office:value-type="float" office:value="1" calcext:value-type="float">
            <text:p>1</text:p>
          </table:table-cell>
          <table:table-cell office:value-type="string" calcext:value-type="string">
            <text:p>ハイケイ</text:p>
          </table:table-cell>
          <table:table-cell table:formula="of:=VLOOKUP([.K355];[$種類番号.$A$1:$種類番号.$B$4];2;0)" office:value-type="float" office:value="2" calcext:value-type="float">
            <text:p>2</text:p>
          </table:table-cell>
          <table:table-cell office:value-type="string" calcext:value-type="string">
            <text:p>緑</text:p>
          </table:table-cell>
          <table:table-cell table:formula="of:=VLOOKUP([.M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IF(ISNA([.$S355]);&quot;null&quot;;&quot;&quot;&quot;&quot;&amp;[.$S355]&amp;&quot;&quot;&quot;&quot;);[$JSON.$E$1];[.$U355];[$JSON.$F$1];IF(ISNA([.$W355]);&quot;null&quot;;&quot;&quot;&quot;&quot;&amp;[.$W355]&amp;&quot;&quot;&quot;&quot;);[$JSON.$G$1];[.$Y355];[$JSON.$H$1];[.$H355];[$JSON.$I$1];[.J355];[$JSON.$J$1];[.$L355];[$JSON.$K$1];[.$O355];[$JSON.$L$1];[.$N355];[$JSON.$M$1];[.$R355];[$JSON.$N$1];[.$T355];[$JSON.$O$1];IF(ISNA([.$V355]);&quot;null&quot;;[.$V355]);[$JSON.$P$1];[.$X355];[$JSON.$Q$1];[.$A355];[$JSON.$R$1];[.$B355];[$JSON.$S$1])" office:value-type="string" office:string-value="{&quot;id&quot;:&quot;4-46&quot;,&quot;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orderTable&quot;:355,&quot;orderDeck&quot;:280}," calcext:value-type="string">
            <text:p>{"id":"4-46","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G356];[$収録番号.$A$1:$収録番号.$B$9];2;0)" office:value-type="float" office:value="45" calcext:value-type="float">
            <text:p>45</text:p>
          </table:table-cell>
          <table:table-cell office:value-type="string" calcext:value-type="string">
            <text:p>N</text:p>
          </table:table-cell>
          <table:table-cell table:formula="of:=VLOOKUP([.I356];[$レアリティ番号.$A$1:$レアリティ番号.$B$4];2;0)" office:value-type="float" office:value="1" calcext:value-type="float">
            <text:p>1</text:p>
          </table:table-cell>
          <table:table-cell office:value-type="string" calcext:value-type="string">
            <text:p>ハイケイ</text:p>
          </table:table-cell>
          <table:table-cell table:formula="of:=VLOOKUP([.K356];[$種類番号.$A$1:$種類番号.$B$4];2;0)" office:value-type="float" office:value="2" calcext:value-type="float">
            <text:p>2</text:p>
          </table:table-cell>
          <table:table-cell office:value-type="string" calcext:value-type="string">
            <text:p>黄</text:p>
          </table:table-cell>
          <table:table-cell table:formula="of:=VLOOKUP([.M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Q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S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formula="of:=NA()" office:value-type="string" office:string-value="" calcext:value-type="error">
            <text:p>#N/A</text:p>
          </table:table-cell>
          <table:table-cell table:style-name="ce8" office:value-type="string" calcext:value-type="string">
            <text:p>喪神</text:p>
          </table:table-cell>
          <table:table-cell table:formula="of:=IFERROR(VLOOKUP([.$W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IF(ISNA([.$S356]);&quot;null&quot;;&quot;&quot;&quot;&quot;&amp;[.$S356]&amp;&quot;&quot;&quot;&quot;);[$JSON.$E$1];[.$U356];[$JSON.$F$1];IF(ISNA([.$W356]);&quot;null&quot;;&quot;&quot;&quot;&quot;&amp;[.$W356]&amp;&quot;&quot;&quot;&quot;);[$JSON.$G$1];[.$Y356];[$JSON.$H$1];[.$H356];[$JSON.$I$1];[.J356];[$JSON.$J$1];[.$L356];[$JSON.$K$1];[.$O356];[$JSON.$L$1];[.$N356];[$JSON.$M$1];[.$R356];[$JSON.$N$1];[.$T356];[$JSON.$O$1];IF(ISNA([.$V356]);&quot;null&quot;;[.$V356]);[$JSON.$P$1];[.$X356];[$JSON.$Q$1];[.$A356];[$JSON.$R$1];[.$B356];[$JSON.$S$1])" office:value-type="string" office:string-value="{&quot;id&quot;:&quot;4-47&quot;,&quot;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orderTable&quot;:356,&quot;orderDeck&quot;:258}," calcext:value-type="string">
            <text:p>{"id":"4-47","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G357];[$収録番号.$A$1:$収録番号.$B$9];2;0)" office:value-type="float" office:value="45" calcext:value-type="float">
            <text:p>45</text:p>
          </table:table-cell>
          <table:table-cell office:value-type="string" calcext:value-type="string">
            <text:p>N</text:p>
          </table:table-cell>
          <table:table-cell table:formula="of:=VLOOKUP([.I357];[$レアリティ番号.$A$1:$レアリティ番号.$B$4];2;0)" office:value-type="float" office:value="1" calcext:value-type="float">
            <text:p>1</text:p>
          </table:table-cell>
          <table:table-cell office:value-type="string" calcext:value-type="string">
            <text:p>ハイケイ</text:p>
          </table:table-cell>
          <table:table-cell table:formula="of:=VLOOKUP([.K357];[$種類番号.$A$1:$種類番号.$B$4];2;0)" office:value-type="float" office:value="2" calcext:value-type="float">
            <text:p>2</text:p>
          </table:table-cell>
          <table:table-cell office:value-type="string" calcext:value-type="string">
            <text:p>黄</text:p>
          </table:table-cell>
          <table:table-cell table:formula="of:=VLOOKUP([.M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formula="of:=NA()" office:value-type="string" office:string-value="" calcext:value-type="error">
            <text:p>#N/A</text:p>
          </table:table-cell>
          <table:table-cell table:style-name="ce8" office:value-type="string" calcext:value-type="string">
            <text:p>山札の上か下に戻す</text:p>
          </table:table-cell>
          <table:table-cell table:formula="of:=IFERROR(VLOOKUP([.$W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IF(ISNA([.$S357]);&quot;null&quot;;&quot;&quot;&quot;&quot;&amp;[.$S357]&amp;&quot;&quot;&quot;&quot;);[$JSON.$E$1];[.$U357];[$JSON.$F$1];IF(ISNA([.$W357]);&quot;null&quot;;&quot;&quot;&quot;&quot;&amp;[.$W357]&amp;&quot;&quot;&quot;&quot;);[$JSON.$G$1];[.$Y357];[$JSON.$H$1];[.$H357];[$JSON.$I$1];[.J357];[$JSON.$J$1];[.$L357];[$JSON.$K$1];[.$O357];[$JSON.$L$1];[.$N357];[$JSON.$M$1];[.$R357];[$JSON.$N$1];[.$T357];[$JSON.$O$1];IF(ISNA([.$V357]);&quot;null&quot;;[.$V357]);[$JSON.$P$1];[.$X357];[$JSON.$Q$1];[.$A357];[$JSON.$R$1];[.$B357];[$JSON.$S$1])" office:value-type="string" office:string-value="{&quot;id&quot;:&quot;4-48&quot;,&quot;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orderTable&quot;:357,&quot;orderDeck&quot;:265}," calcext:value-type="string">
            <text:p>{"id":"4-48","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G358];[$収録番号.$A$1:$収録番号.$B$9];2;0)" office:value-type="float" office:value="45" calcext:value-type="float">
            <text:p>45</text:p>
          </table:table-cell>
          <table:table-cell office:value-type="string" calcext:value-type="string">
            <text:p>N</text:p>
          </table:table-cell>
          <table:table-cell table:formula="of:=VLOOKUP([.I358];[$レアリティ番号.$A$1:$レアリティ番号.$B$4];2;0)" office:value-type="float" office:value="1" calcext:value-type="float">
            <text:p>1</text:p>
          </table:table-cell>
          <table:table-cell office:value-type="string" calcext:value-type="string">
            <text:p>ハイケイ</text:p>
          </table:table-cell>
          <table:table-cell table:formula="of:=VLOOKUP([.K358];[$種類番号.$A$1:$種類番号.$B$4];2;0)" office:value-type="float" office:value="2" calcext:value-type="float">
            <text:p>2</text:p>
          </table:table-cell>
          <table:table-cell office:value-type="string" calcext:value-type="string">
            <text:p>紫</text:p>
          </table:table-cell>
          <table:table-cell table:formula="of:=VLOOKUP([.M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IF(ISNA([.$S358]);&quot;null&quot;;&quot;&quot;&quot;&quot;&amp;[.$S358]&amp;&quot;&quot;&quot;&quot;);[$JSON.$E$1];[.$U358];[$JSON.$F$1];IF(ISNA([.$W358]);&quot;null&quot;;&quot;&quot;&quot;&quot;&amp;[.$W358]&amp;&quot;&quot;&quot;&quot;);[$JSON.$G$1];[.$Y358];[$JSON.$H$1];[.$H358];[$JSON.$I$1];[.J358];[$JSON.$J$1];[.$L358];[$JSON.$K$1];[.$O358];[$JSON.$L$1];[.$N358];[$JSON.$M$1];[.$R358];[$JSON.$N$1];[.$T358];[$JSON.$O$1];IF(ISNA([.$V358]);&quot;null&quot;;[.$V358]);[$JSON.$P$1];[.$X358];[$JSON.$Q$1];[.$A358];[$JSON.$R$1];[.$B358];[$JSON.$S$1])" office:value-type="string" office:string-value="{&quot;id&quot;:&quot;4-49&quot;,&quot;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orderTable&quot;:358,&quot;orderDeck&quot;:272}," calcext:value-type="string">
            <text:p>{"id":"4-49","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G359];[$収録番号.$A$1:$収録番号.$B$9];2;0)" office:value-type="float" office:value="45" calcext:value-type="float">
            <text:p>45</text:p>
          </table:table-cell>
          <table:table-cell office:value-type="string" calcext:value-type="string">
            <text:p>N</text:p>
          </table:table-cell>
          <table:table-cell table:formula="of:=VLOOKUP([.I359];[$レアリティ番号.$A$1:$レアリティ番号.$B$4];2;0)" office:value-type="float" office:value="1" calcext:value-type="float">
            <text:p>1</text:p>
          </table:table-cell>
          <table:table-cell office:value-type="string" calcext:value-type="string">
            <text:p>ハイケイ</text:p>
          </table:table-cell>
          <table:table-cell table:formula="of:=VLOOKUP([.K359];[$種類番号.$A$1:$種類番号.$B$4];2;0)" office:value-type="float" office:value="2" calcext:value-type="float">
            <text:p>2</text:p>
          </table:table-cell>
          <table:table-cell office:value-type="string" calcext:value-type="string">
            <text:p>紫</text:p>
          </table:table-cell>
          <table:table-cell table:formula="of:=VLOOKUP([.M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formula="of:=NA()" office:value-type="string" office:string-value="" calcext:value-type="error">
            <text:p>#N/A</text:p>
          </table:table-cell>
          <table:table-cell table:style-name="ce8" table:formula="of:=NA()" office:value-type="string" office:string-value="" calcext:value-type="error">
            <text:p>#N/A</text:p>
          </table:table-cell>
          <table:table-cell table:formula="of:=IFERROR(VLOOKUP([.$W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IF(ISNA([.$S359]);&quot;null&quot;;&quot;&quot;&quot;&quot;&amp;[.$S359]&amp;&quot;&quot;&quot;&quot;);[$JSON.$E$1];[.$U359];[$JSON.$F$1];IF(ISNA([.$W359]);&quot;null&quot;;&quot;&quot;&quot;&quot;&amp;[.$W359]&amp;&quot;&quot;&quot;&quot;);[$JSON.$G$1];[.$Y359];[$JSON.$H$1];[.$H359];[$JSON.$I$1];[.J359];[$JSON.$J$1];[.$L359];[$JSON.$K$1];[.$O359];[$JSON.$L$1];[.$N359];[$JSON.$M$1];[.$R359];[$JSON.$N$1];[.$T359];[$JSON.$O$1];IF(ISNA([.$V359]);&quot;null&quot;;[.$V359]);[$JSON.$P$1];[.$X359];[$JSON.$Q$1];[.$A359];[$JSON.$R$1];[.$B359];[$JSON.$S$1])" office:value-type="string" office:string-value="{&quot;id&quot;:&quot;4-50&quot;,&quot;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orderTable&quot;:359,&quot;orderDeck&quot;:273}," calcext:value-type="string">
            <text:p>{"id":"4-50","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G360];[$収録番号.$A$1:$収録番号.$B$9];2;0)" office:value-type="float" office:value="45" calcext:value-type="float">
            <text:p>45</text:p>
          </table:table-cell>
          <table:table-cell office:value-type="string" calcext:value-type="string">
            <text:p>N</text:p>
          </table:table-cell>
          <table:table-cell table:formula="of:=VLOOKUP([.I360];[$レアリティ番号.$A$1:$レアリティ番号.$B$4];2;0)" office:value-type="float" office:value="1" calcext:value-type="float">
            <text:p>1</text:p>
          </table:table-cell>
          <table:table-cell office:value-type="string" calcext:value-type="string">
            <text:p>マホウ</text:p>
          </table:table-cell>
          <table:table-cell table:formula="of:=VLOOKUP([.K360];[$種類番号.$A$1:$種類番号.$B$4];2;0)" office:value-type="float" office:value="3" calcext:value-type="float">
            <text:p>3</text:p>
          </table:table-cell>
          <table:table-cell office:value-type="string" calcext:value-type="string">
            <text:p>赤</text:p>
          </table:table-cell>
          <table:table-cell table:formula="of:=VLOOKUP([.M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IF(ISNA([.$S360]);&quot;null&quot;;&quot;&quot;&quot;&quot;&amp;[.$S360]&amp;&quot;&quot;&quot;&quot;);[$JSON.$E$1];[.$U360];[$JSON.$F$1];IF(ISNA([.$W360]);&quot;null&quot;;&quot;&quot;&quot;&quot;&amp;[.$W360]&amp;&quot;&quot;&quot;&quot;);[$JSON.$G$1];[.$Y360];[$JSON.$H$1];[.$H360];[$JSON.$I$1];[.J360];[$JSON.$J$1];[.$L360];[$JSON.$K$1];[.$O360];[$JSON.$L$1];[.$N360];[$JSON.$M$1];[.$R360];[$JSON.$N$1];[.$T360];[$JSON.$O$1];IF(ISNA([.$V360]);&quot;null&quot;;[.$V360]);[$JSON.$P$1];[.$X360];[$JSON.$Q$1];[.$A360];[$JSON.$R$1];[.$B360];[$JSON.$S$1])" office:value-type="string" office:string-value="{&quot;id&quot;:&quot;4-51&quot;,&quot;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orderTable&quot;:360,&quot;orderDeck&quot;:282}," calcext:value-type="string">
            <text:p>{"id":"4-51","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G361];[$収録番号.$A$1:$収録番号.$B$9];2;0)" office:value-type="float" office:value="45" calcext:value-type="float">
            <text:p>45</text:p>
          </table:table-cell>
          <table:table-cell office:value-type="string" calcext:value-type="string">
            <text:p>N</text:p>
          </table:table-cell>
          <table:table-cell table:formula="of:=VLOOKUP([.I361];[$レアリティ番号.$A$1:$レアリティ番号.$B$4];2;0)" office:value-type="float" office:value="1" calcext:value-type="float">
            <text:p>1</text:p>
          </table:table-cell>
          <table:table-cell office:value-type="string" calcext:value-type="string">
            <text:p>マホウ</text:p>
          </table:table-cell>
          <table:table-cell table:formula="of:=VLOOKUP([.K361];[$種類番号.$A$1:$種類番号.$B$4];2;0)" office:value-type="float" office:value="3" calcext:value-type="float">
            <text:p>3</text:p>
          </table:table-cell>
          <table:table-cell office:value-type="string" calcext:value-type="string">
            <text:p>赤</text:p>
          </table:table-cell>
          <table:table-cell table:formula="of:=VLOOKUP([.M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IF(ISNA([.$S361]);&quot;null&quot;;&quot;&quot;&quot;&quot;&amp;[.$S361]&amp;&quot;&quot;&quot;&quot;);[$JSON.$E$1];[.$U361];[$JSON.$F$1];IF(ISNA([.$W361]);&quot;null&quot;;&quot;&quot;&quot;&quot;&amp;[.$W361]&amp;&quot;&quot;&quot;&quot;);[$JSON.$G$1];[.$Y361];[$JSON.$H$1];[.$H361];[$JSON.$I$1];[.J361];[$JSON.$J$1];[.$L361];[$JSON.$K$1];[.$O361];[$JSON.$L$1];[.$N361];[$JSON.$M$1];[.$R361];[$JSON.$N$1];[.$T361];[$JSON.$O$1];IF(ISNA([.$V361]);&quot;null&quot;;[.$V361]);[$JSON.$P$1];[.$X361];[$JSON.$Q$1];[.$A361];[$JSON.$R$1];[.$B361];[$JSON.$S$1])" office:value-type="string" office:string-value="{&quot;id&quot;:&quot;4-52&quot;,&quot;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orderTable&quot;:361,&quot;orderDeck&quot;:325}," calcext:value-type="string">
            <text:p>{"id":"4-52","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G362];[$収録番号.$A$1:$収録番号.$B$9];2;0)" office:value-type="float" office:value="45" calcext:value-type="float">
            <text:p>45</text:p>
          </table:table-cell>
          <table:table-cell office:value-type="string" calcext:value-type="string">
            <text:p>N</text:p>
          </table:table-cell>
          <table:table-cell table:formula="of:=VLOOKUP([.I362];[$レアリティ番号.$A$1:$レアリティ番号.$B$4];2;0)" office:value-type="float" office:value="1" calcext:value-type="float">
            <text:p>1</text:p>
          </table:table-cell>
          <table:table-cell office:value-type="string" calcext:value-type="string">
            <text:p>マホウ</text:p>
          </table:table-cell>
          <table:table-cell table:formula="of:=VLOOKUP([.K362];[$種類番号.$A$1:$種類番号.$B$4];2;0)" office:value-type="float" office:value="3" calcext:value-type="float">
            <text:p>3</text:p>
          </table:table-cell>
          <table:table-cell office:value-type="string" calcext:value-type="string">
            <text:p>青</text:p>
          </table:table-cell>
          <table:table-cell table:formula="of:=VLOOKUP([.M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Q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formula="of:=NA()" office:value-type="string" office:string-value="" calcext:value-type="error">
            <text:p>#N/A</text:p>
          </table:table-cell>
          <table:table-cell table:style-name="ce8" office:value-type="string" calcext:value-type="string">
            <text:p>1ドローする</text:p>
          </table:table-cell>
          <table:table-cell table:formula="of:=IFERROR(VLOOKUP([.$W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IF(ISNA([.$S362]);&quot;null&quot;;&quot;&quot;&quot;&quot;&amp;[.$S362]&amp;&quot;&quot;&quot;&quot;);[$JSON.$E$1];[.$U362];[$JSON.$F$1];IF(ISNA([.$W362]);&quot;null&quot;;&quot;&quot;&quot;&quot;&amp;[.$W362]&amp;&quot;&quot;&quot;&quot;);[$JSON.$G$1];[.$Y362];[$JSON.$H$1];[.$H362];[$JSON.$I$1];[.J362];[$JSON.$J$1];[.$L362];[$JSON.$K$1];[.$O362];[$JSON.$L$1];[.$N362];[$JSON.$M$1];[.$R362];[$JSON.$N$1];[.$T362];[$JSON.$O$1];IF(ISNA([.$V362]);&quot;null&quot;;[.$V362]);[$JSON.$P$1];[.$X362];[$JSON.$Q$1];[.$A362];[$JSON.$R$1];[.$B362];[$JSON.$S$1])" office:value-type="string" office:string-value="{&quot;id&quot;:&quot;4-53&quot;,&quot;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orderTable&quot;:362,&quot;orderDeck&quot;:281}," calcext:value-type="string">
            <text:p>{"id":"4-53","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G363];[$収録番号.$A$1:$収録番号.$B$9];2;0)" office:value-type="float" office:value="45" calcext:value-type="float">
            <text:p>45</text:p>
          </table:table-cell>
          <table:table-cell office:value-type="string" calcext:value-type="string">
            <text:p>N</text:p>
          </table:table-cell>
          <table:table-cell table:formula="of:=VLOOKUP([.I363];[$レアリティ番号.$A$1:$レアリティ番号.$B$4];2;0)" office:value-type="float" office:value="1" calcext:value-type="float">
            <text:p>1</text:p>
          </table:table-cell>
          <table:table-cell office:value-type="string" calcext:value-type="string">
            <text:p>マホウ</text:p>
          </table:table-cell>
          <table:table-cell table:formula="of:=VLOOKUP([.K363];[$種類番号.$A$1:$種類番号.$B$4];2;0)" office:value-type="float" office:value="3" calcext:value-type="float">
            <text:p>3</text:p>
          </table:table-cell>
          <table:table-cell office:value-type="string" calcext:value-type="string">
            <text:p>青</text:p>
          </table:table-cell>
          <table:table-cell table:formula="of:=VLOOKUP([.M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Q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IF(ISNA([.$S363]);&quot;null&quot;;&quot;&quot;&quot;&quot;&amp;[.$S363]&amp;&quot;&quot;&quot;&quot;);[$JSON.$E$1];[.$U363];[$JSON.$F$1];IF(ISNA([.$W363]);&quot;null&quot;;&quot;&quot;&quot;&quot;&amp;[.$W363]&amp;&quot;&quot;&quot;&quot;);[$JSON.$G$1];[.$Y363];[$JSON.$H$1];[.$H363];[$JSON.$I$1];[.J363];[$JSON.$J$1];[.$L363];[$JSON.$K$1];[.$O363];[$JSON.$L$1];[.$N363];[$JSON.$M$1];[.$R363];[$JSON.$N$1];[.$T363];[$JSON.$O$1];IF(ISNA([.$V363]);&quot;null&quot;;[.$V363]);[$JSON.$P$1];[.$X363];[$JSON.$Q$1];[.$A363];[$JSON.$R$1];[.$B363];[$JSON.$S$1])" office:value-type="string" office:string-value="{&quot;id&quot;:&quot;4-54&quot;,&quot;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orderTable&quot;:363,&quot;orderDeck&quot;:283}," calcext:value-type="string">
            <text:p>{"id":"4-54","name":"ドロレス","kana":"どろれす","traitText":null,"ruleText":"相手の手札を見てレベル3以上のカード1つを墓地に置く。","legacyText":"冥府発動","imageUrl":"https://one-draw.jp/ijinden/cardlist/004/card/04_054.png","expansion":45,"rarity":1,"type":3,"level":1,"color":2,"term":0,"trait":0,"power":null,"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G364];[$収録番号.$A$1:$収録番号.$B$9];2;0)" office:value-type="float" office:value="45" calcext:value-type="float">
            <text:p>45</text:p>
          </table:table-cell>
          <table:table-cell office:value-type="string" calcext:value-type="string">
            <text:p>N</text:p>
          </table:table-cell>
          <table:table-cell table:formula="of:=VLOOKUP([.I364];[$レアリティ番号.$A$1:$レアリティ番号.$B$4];2;0)" office:value-type="float" office:value="1" calcext:value-type="float">
            <text:p>1</text:p>
          </table:table-cell>
          <table:table-cell office:value-type="string" calcext:value-type="string">
            <text:p>マホウ</text:p>
          </table:table-cell>
          <table:table-cell table:formula="of:=VLOOKUP([.K364];[$種類番号.$A$1:$種類番号.$B$4];2;0)" office:value-type="float" office:value="3" calcext:value-type="float">
            <text:p>3</text:p>
          </table:table-cell>
          <table:table-cell office:value-type="string" calcext:value-type="string">
            <text:p>緑</text:p>
          </table:table-cell>
          <table:table-cell table:formula="of:=VLOOKUP([.M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Q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IF(ISNA([.$S364]);&quot;null&quot;;&quot;&quot;&quot;&quot;&amp;[.$S364]&amp;&quot;&quot;&quot;&quot;);[$JSON.$E$1];[.$U364];[$JSON.$F$1];IF(ISNA([.$W364]);&quot;null&quot;;&quot;&quot;&quot;&quot;&amp;[.$W364]&amp;&quot;&quot;&quot;&quot;);[$JSON.$G$1];[.$Y364];[$JSON.$H$1];[.$H364];[$JSON.$I$1];[.J364];[$JSON.$J$1];[.$L364];[$JSON.$K$1];[.$O364];[$JSON.$L$1];[.$N364];[$JSON.$M$1];[.$R364];[$JSON.$N$1];[.$T364];[$JSON.$O$1];IF(ISNA([.$V364]);&quot;null&quot;;[.$V364]);[$JSON.$P$1];[.$X364];[$JSON.$Q$1];[.$A364];[$JSON.$R$1];[.$B364];[$JSON.$S$1])" office:value-type="string" office:string-value="{&quot;id&quot;:&quot;4-55&quot;,&quot;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orderTable&quot;:364,&quot;orderDeck&quot;:327}," calcext:value-type="string">
            <text:p>{"id":"4-55","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G365];[$収録番号.$A$1:$収録番号.$B$9];2;0)" office:value-type="float" office:value="45" calcext:value-type="float">
            <text:p>45</text:p>
          </table:table-cell>
          <table:table-cell office:value-type="string" calcext:value-type="string">
            <text:p>N</text:p>
          </table:table-cell>
          <table:table-cell table:formula="of:=VLOOKUP([.I365];[$レアリティ番号.$A$1:$レアリティ番号.$B$4];2;0)" office:value-type="float" office:value="1" calcext:value-type="float">
            <text:p>1</text:p>
          </table:table-cell>
          <table:table-cell office:value-type="string" calcext:value-type="string">
            <text:p>マホウ</text:p>
          </table:table-cell>
          <table:table-cell table:formula="of:=VLOOKUP([.K365];[$種類番号.$A$1:$種類番号.$B$4];2;0)" office:value-type="float" office:value="3" calcext:value-type="float">
            <text:p>3</text:p>
          </table:table-cell>
          <table:table-cell office:value-type="string" calcext:value-type="string">
            <text:p>緑</text:p>
          </table:table-cell>
          <table:table-cell table:formula="of:=VLOOKUP([.M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IF(ISNA([.$S365]);&quot;null&quot;;&quot;&quot;&quot;&quot;&amp;[.$S365]&amp;&quot;&quot;&quot;&quot;);[$JSON.$E$1];[.$U365];[$JSON.$F$1];IF(ISNA([.$W365]);&quot;null&quot;;&quot;&quot;&quot;&quot;&amp;[.$W365]&amp;&quot;&quot;&quot;&quot;);[$JSON.$G$1];[.$Y365];[$JSON.$H$1];[.$H365];[$JSON.$I$1];[.J365];[$JSON.$J$1];[.$L365];[$JSON.$K$1];[.$O365];[$JSON.$L$1];[.$N365];[$JSON.$M$1];[.$R365];[$JSON.$N$1];[.$T365];[$JSON.$O$1];IF(ISNA([.$V365]);&quot;null&quot;;[.$V365]);[$JSON.$P$1];[.$X365];[$JSON.$Q$1];[.$A365];[$JSON.$R$1];[.$B365];[$JSON.$S$1])" office:value-type="string" office:string-value="{&quot;id&quot;:&quot;4-56&quot;,&quot;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orderTable&quot;:365,&quot;orderDeck&quot;:310}," calcext:value-type="string">
            <text:p>{"id":"4-56","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G366];[$収録番号.$A$1:$収録番号.$B$9];2;0)" office:value-type="float" office:value="45" calcext:value-type="float">
            <text:p>45</text:p>
          </table:table-cell>
          <table:table-cell office:value-type="string" calcext:value-type="string">
            <text:p>N</text:p>
          </table:table-cell>
          <table:table-cell table:formula="of:=VLOOKUP([.I366];[$レアリティ番号.$A$1:$レアリティ番号.$B$4];2;0)" office:value-type="float" office:value="1" calcext:value-type="float">
            <text:p>1</text:p>
          </table:table-cell>
          <table:table-cell office:value-type="string" calcext:value-type="string">
            <text:p>マホウ</text:p>
          </table:table-cell>
          <table:table-cell table:formula="of:=VLOOKUP([.K366];[$種類番号.$A$1:$種類番号.$B$4];2;0)" office:value-type="float" office:value="3" calcext:value-type="float">
            <text:p>3</text:p>
          </table:table-cell>
          <table:table-cell office:value-type="string" calcext:value-type="string">
            <text:p>黄</text:p>
          </table:table-cell>
          <table:table-cell table:formula="of:=VLOOKUP([.M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Q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IF(ISNA([.$S366]);&quot;null&quot;;&quot;&quot;&quot;&quot;&amp;[.$S366]&amp;&quot;&quot;&quot;&quot;);[$JSON.$E$1];[.$U366];[$JSON.$F$1];IF(ISNA([.$W366]);&quot;null&quot;;&quot;&quot;&quot;&quot;&amp;[.$W366]&amp;&quot;&quot;&quot;&quot;);[$JSON.$G$1];[.$Y366];[$JSON.$H$1];[.$H366];[$JSON.$I$1];[.J366];[$JSON.$J$1];[.$L366];[$JSON.$K$1];[.$O366];[$JSON.$L$1];[.$N366];[$JSON.$M$1];[.$R366];[$JSON.$N$1];[.$T366];[$JSON.$O$1];IF(ISNA([.$V366]);&quot;null&quot;;[.$V366]);[$JSON.$P$1];[.$X366];[$JSON.$Q$1];[.$A366];[$JSON.$R$1];[.$B366];[$JSON.$S$1])" office:value-type="string" office:string-value="{&quot;id&quot;:&quot;4-57&quot;,&quot;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orderTable&quot;:366,&quot;orderDeck&quot;:311}," calcext:value-type="string">
            <text:p>{"id":"4-57","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G367];[$収録番号.$A$1:$収録番号.$B$9];2;0)" office:value-type="float" office:value="45" calcext:value-type="float">
            <text:p>45</text:p>
          </table:table-cell>
          <table:table-cell office:value-type="string" calcext:value-type="string">
            <text:p>N</text:p>
          </table:table-cell>
          <table:table-cell table:formula="of:=VLOOKUP([.I367];[$レアリティ番号.$A$1:$レアリティ番号.$B$4];2;0)" office:value-type="float" office:value="1" calcext:value-type="float">
            <text:p>1</text:p>
          </table:table-cell>
          <table:table-cell office:value-type="string" calcext:value-type="string">
            <text:p>マホウ</text:p>
          </table:table-cell>
          <table:table-cell table:formula="of:=VLOOKUP([.K367];[$種類番号.$A$1:$種類番号.$B$4];2;0)" office:value-type="float" office:value="3" calcext:value-type="float">
            <text:p>3</text:p>
          </table:table-cell>
          <table:table-cell office:value-type="string" calcext:value-type="string">
            <text:p>黄</text:p>
          </table:table-cell>
          <table:table-cell table:formula="of:=VLOOKUP([.M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Q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IF(ISNA([.$S367]);&quot;null&quot;;&quot;&quot;&quot;&quot;&amp;[.$S367]&amp;&quot;&quot;&quot;&quot;);[$JSON.$E$1];[.$U367];[$JSON.$F$1];IF(ISNA([.$W367]);&quot;null&quot;;&quot;&quot;&quot;&quot;&amp;[.$W367]&amp;&quot;&quot;&quot;&quot;);[$JSON.$G$1];[.$Y367];[$JSON.$H$1];[.$H367];[$JSON.$I$1];[.J367];[$JSON.$J$1];[.$L367];[$JSON.$K$1];[.$O367];[$JSON.$L$1];[.$N367];[$JSON.$M$1];[.$R367];[$JSON.$N$1];[.$T367];[$JSON.$O$1];IF(ISNA([.$V367]);&quot;null&quot;;[.$V367]);[$JSON.$P$1];[.$X367];[$JSON.$Q$1];[.$A367];[$JSON.$R$1];[.$B367];[$JSON.$S$1])" office:value-type="string" office:string-value="{&quot;id&quot;:&quot;4-58&quot;,&quot;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orderTable&quot;:367,&quot;orderDeck&quot;:312}," calcext:value-type="string">
            <text:p>{"id":"4-58","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G368];[$収録番号.$A$1:$収録番号.$B$9];2;0)" office:value-type="float" office:value="45" calcext:value-type="float">
            <text:p>45</text:p>
          </table:table-cell>
          <table:table-cell office:value-type="string" calcext:value-type="string">
            <text:p>N</text:p>
          </table:table-cell>
          <table:table-cell table:formula="of:=VLOOKUP([.I368];[$レアリティ番号.$A$1:$レアリティ番号.$B$4];2;0)" office:value-type="float" office:value="1" calcext:value-type="float">
            <text:p>1</text:p>
          </table:table-cell>
          <table:table-cell office:value-type="string" calcext:value-type="string">
            <text:p>マホウ</text:p>
          </table:table-cell>
          <table:table-cell table:formula="of:=VLOOKUP([.K368];[$種類番号.$A$1:$種類番号.$B$4];2;0)" office:value-type="float" office:value="3" calcext:value-type="float">
            <text:p>3</text:p>
          </table:table-cell>
          <table:table-cell office:value-type="string" calcext:value-type="string">
            <text:p>紫</text:p>
          </table:table-cell>
          <table:table-cell table:formula="of:=VLOOKUP([.M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Q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IF(ISNA([.$S368]);&quot;null&quot;;&quot;&quot;&quot;&quot;&amp;[.$S368]&amp;&quot;&quot;&quot;&quot;);[$JSON.$E$1];[.$U368];[$JSON.$F$1];IF(ISNA([.$W368]);&quot;null&quot;;&quot;&quot;&quot;&quot;&amp;[.$W368]&amp;&quot;&quot;&quot;&quot;);[$JSON.$G$1];[.$Y368];[$JSON.$H$1];[.$H368];[$JSON.$I$1];[.J368];[$JSON.$J$1];[.$L368];[$JSON.$K$1];[.$O368];[$JSON.$L$1];[.$N368];[$JSON.$M$1];[.$R368];[$JSON.$N$1];[.$T368];[$JSON.$O$1];IF(ISNA([.$V368]);&quot;null&quot;;[.$V368]);[$JSON.$P$1];[.$X368];[$JSON.$Q$1];[.$A368];[$JSON.$R$1];[.$B368];[$JSON.$S$1])" office:value-type="string" office:string-value="{&quot;id&quot;:&quot;4-59&quot;,&quot;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orderTable&quot;:368,&quot;orderDeck&quot;:331}," calcext:value-type="string">
            <text:p>{"id":"4-59","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G369];[$収録番号.$A$1:$収録番号.$B$9];2;0)" office:value-type="float" office:value="45" calcext:value-type="float">
            <text:p>45</text:p>
          </table:table-cell>
          <table:table-cell office:value-type="string" calcext:value-type="string">
            <text:p>N</text:p>
          </table:table-cell>
          <table:table-cell table:formula="of:=VLOOKUP([.I369];[$レアリティ番号.$A$1:$レアリティ番号.$B$4];2;0)" office:value-type="float" office:value="1" calcext:value-type="float">
            <text:p>1</text:p>
          </table:table-cell>
          <table:table-cell office:value-type="string" calcext:value-type="string">
            <text:p>マホウ</text:p>
          </table:table-cell>
          <table:table-cell table:formula="of:=VLOOKUP([.K369];[$種類番号.$A$1:$種類番号.$B$4];2;0)" office:value-type="float" office:value="3" calcext:value-type="float">
            <text:p>3</text:p>
          </table:table-cell>
          <table:table-cell office:value-type="string" calcext:value-type="string">
            <text:p>紫</text:p>
          </table:table-cell>
          <table:table-cell table:formula="of:=VLOOKUP([.M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Q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IF(ISNA([.$S369]);&quot;null&quot;;&quot;&quot;&quot;&quot;&amp;[.$S369]&amp;&quot;&quot;&quot;&quot;);[$JSON.$E$1];[.$U369];[$JSON.$F$1];IF(ISNA([.$W369]);&quot;null&quot;;&quot;&quot;&quot;&quot;&amp;[.$W369]&amp;&quot;&quot;&quot;&quot;);[$JSON.$G$1];[.$Y369];[$JSON.$H$1];[.$H369];[$JSON.$I$1];[.J369];[$JSON.$J$1];[.$L369];[$JSON.$K$1];[.$O369];[$JSON.$L$1];[.$N369];[$JSON.$M$1];[.$R369];[$JSON.$N$1];[.$T369];[$JSON.$O$1];IF(ISNA([.$V369]);&quot;null&quot;;[.$V369]);[$JSON.$P$1];[.$X369];[$JSON.$Q$1];[.$A369];[$JSON.$R$1];[.$B369];[$JSON.$S$1])" office:value-type="string" office:string-value="{&quot;id&quot;:&quot;4-60&quot;,&quot;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orderTable&quot;:369,&quot;orderDeck&quot;:335}," calcext:value-type="string">
            <text:p>{"id":"4-60","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G370];[$収録番号.$A$1:$収録番号.$B$9];2;0)" office:value-type="float" office:value="45" calcext:value-type="float">
            <text:p>45</text:p>
          </table:table-cell>
          <table:table-cell office:value-type="string" calcext:value-type="string">
            <text:p>N</text:p>
          </table:table-cell>
          <table:table-cell table:formula="of:=VLOOKUP([.I370];[$レアリティ番号.$A$1:$レアリティ番号.$B$4];2;0)" office:value-type="float" office:value="1" calcext:value-type="float">
            <text:p>1</text:p>
          </table:table-cell>
          <table:table-cell office:value-type="string" calcext:value-type="string">
            <text:p>マホウ</text:p>
          </table:table-cell>
          <table:table-cell table:formula="of:=VLOOKUP([.K370];[$種類番号.$A$1:$種類番号.$B$4];2;0)" office:value-type="float" office:value="3" calcext:value-type="float">
            <text:p>3</text:p>
          </table:table-cell>
          <table:table-cell office:value-type="string" calcext:value-type="string">
            <text:p>無色</text:p>
          </table:table-cell>
          <table:table-cell table:formula="of:=VLOOKUP([.M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Q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S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IF(ISNA([.$S370]);&quot;null&quot;;&quot;&quot;&quot;&quot;&amp;[.$S370]&amp;&quot;&quot;&quot;&quot;);[$JSON.$E$1];[.$U370];[$JSON.$F$1];IF(ISNA([.$W370]);&quot;null&quot;;&quot;&quot;&quot;&quot;&amp;[.$W370]&amp;&quot;&quot;&quot;&quot;);[$JSON.$G$1];[.$Y370];[$JSON.$H$1];[.$H370];[$JSON.$I$1];[.J370];[$JSON.$J$1];[.$L370];[$JSON.$K$1];[.$O370];[$JSON.$L$1];[.$N370];[$JSON.$M$1];[.$R370];[$JSON.$N$1];[.$T370];[$JSON.$O$1];IF(ISNA([.$V370]);&quot;null&quot;;[.$V370]);[$JSON.$P$1];[.$X370];[$JSON.$Q$1];[.$A370];[$JSON.$R$1];[.$B370];[$JSON.$S$1])" office:value-type="string" office:string-value="{&quot;id&quot;:&quot;4-61&quot;,&quot;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orderTable&quot;:370,&quot;orderDeck&quot;:287}," calcext:value-type="string">
            <text:p>{"id":"4-61","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G371];[$収録番号.$A$1:$収録番号.$B$9];2;0)" office:value-type="float" office:value="45" calcext:value-type="float">
            <text:p>45</text:p>
          </table:table-cell>
          <table:table-cell office:value-type="string" calcext:value-type="string">
            <text:p>N</text:p>
          </table:table-cell>
          <table:table-cell table:formula="of:=VLOOKUP([.I371];[$レアリティ番号.$A$1:$レアリティ番号.$B$4];2;0)" office:value-type="float" office:value="1" calcext:value-type="float">
            <text:p>1</text:p>
          </table:table-cell>
          <table:table-cell office:value-type="string" calcext:value-type="string">
            <text:p>マホウ</text:p>
          </table:table-cell>
          <table:table-cell table:formula="of:=VLOOKUP([.K371];[$種類番号.$A$1:$種類番号.$B$4];2;0)" office:value-type="float" office:value="3" calcext:value-type="float">
            <text:p>3</text:p>
          </table:table-cell>
          <table:table-cell office:value-type="string" calcext:value-type="string">
            <text:p>無色</text:p>
          </table:table-cell>
          <table:table-cell table:formula="of:=VLOOKUP([.M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Q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S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IF(ISNA([.$S371]);&quot;null&quot;;&quot;&quot;&quot;&quot;&amp;[.$S371]&amp;&quot;&quot;&quot;&quot;);[$JSON.$E$1];[.$U371];[$JSON.$F$1];IF(ISNA([.$W371]);&quot;null&quot;;&quot;&quot;&quot;&quot;&amp;[.$W371]&amp;&quot;&quot;&quot;&quot;);[$JSON.$G$1];[.$Y371];[$JSON.$H$1];[.$H371];[$JSON.$I$1];[.J371];[$JSON.$J$1];[.$L371];[$JSON.$K$1];[.$O371];[$JSON.$L$1];[.$N371];[$JSON.$M$1];[.$R371];[$JSON.$N$1];[.$T371];[$JSON.$O$1];IF(ISNA([.$V371]);&quot;null&quot;;[.$V371]);[$JSON.$P$1];[.$X371];[$JSON.$Q$1];[.$A371];[$JSON.$R$1];[.$B371];[$JSON.$S$1])" office:value-type="string" office:string-value="{&quot;id&quot;:&quot;4-62&quot;,&quot;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orderTable&quot;:371,&quot;orderDeck&quot;:288}," calcext:value-type="string">
            <text:p>{"id":"4-62","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G372];[$収録番号.$A$1:$収録番号.$B$9];2;0)" office:value-type="float" office:value="45" calcext:value-type="float">
            <text:p>45</text:p>
          </table:table-cell>
          <table:table-cell office:value-type="string" calcext:value-type="string">
            <text:p>N</text:p>
          </table:table-cell>
          <table:table-cell table:formula="of:=VLOOKUP([.I372];[$レアリティ番号.$A$1:$レアリティ番号.$B$4];2;0)" office:value-type="float" office:value="1" calcext:value-type="float">
            <text:p>1</text:p>
          </table:table-cell>
          <table:table-cell office:value-type="string" calcext:value-type="string">
            <text:p>マホウ</text:p>
          </table:table-cell>
          <table:table-cell table:formula="of:=VLOOKUP([.K372];[$種類番号.$A$1:$種類番号.$B$4];2;0)" office:value-type="float" office:value="3" calcext:value-type="float">
            <text:p>3</text:p>
          </table:table-cell>
          <table:table-cell office:value-type="string" calcext:value-type="string">
            <text:p>無色</text:p>
          </table:table-cell>
          <table:table-cell table:formula="of:=VLOOKUP([.M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Q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S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IF(ISNA([.$S372]);&quot;null&quot;;&quot;&quot;&quot;&quot;&amp;[.$S372]&amp;&quot;&quot;&quot;&quot;);[$JSON.$E$1];[.$U372];[$JSON.$F$1];IF(ISNA([.$W372]);&quot;null&quot;;&quot;&quot;&quot;&quot;&amp;[.$W372]&amp;&quot;&quot;&quot;&quot;);[$JSON.$G$1];[.$Y372];[$JSON.$H$1];[.$H372];[$JSON.$I$1];[.J372];[$JSON.$J$1];[.$L372];[$JSON.$K$1];[.$O372];[$JSON.$L$1];[.$N372];[$JSON.$M$1];[.$R372];[$JSON.$N$1];[.$T372];[$JSON.$O$1];IF(ISNA([.$V372]);&quot;null&quot;;[.$V372]);[$JSON.$P$1];[.$X372];[$JSON.$Q$1];[.$A372];[$JSON.$R$1];[.$B372];[$JSON.$S$1])" office:value-type="string" office:string-value="{&quot;id&quot;:&quot;4-63&quot;,&quot;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orderTable&quot;:372,&quot;orderDeck&quot;:289}," calcext:value-type="string">
            <text:p>{"id":"4-63","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G373];[$収録番号.$A$1:$収録番号.$B$9];2;0)" office:value-type="float" office:value="45" calcext:value-type="float">
            <text:p>45</text:p>
          </table:table-cell>
          <table:table-cell office:value-type="string" calcext:value-type="string">
            <text:p>N</text:p>
          </table:table-cell>
          <table:table-cell table:formula="of:=VLOOKUP([.I373];[$レアリティ番号.$A$1:$レアリティ番号.$B$4];2;0)" office:value-type="float" office:value="1" calcext:value-type="float">
            <text:p>1</text:p>
          </table:table-cell>
          <table:table-cell office:value-type="string" calcext:value-type="string">
            <text:p>マホウ</text:p>
          </table:table-cell>
          <table:table-cell table:formula="of:=VLOOKUP([.K373];[$種類番号.$A$1:$種類番号.$B$4];2;0)" office:value-type="float" office:value="3" calcext:value-type="float">
            <text:p>3</text:p>
          </table:table-cell>
          <table:table-cell office:value-type="string" calcext:value-type="string">
            <text:p>無色</text:p>
          </table:table-cell>
          <table:table-cell table:formula="of:=VLOOKUP([.M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Q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S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IF(ISNA([.$S373]);&quot;null&quot;;&quot;&quot;&quot;&quot;&amp;[.$S373]&amp;&quot;&quot;&quot;&quot;);[$JSON.$E$1];[.$U373];[$JSON.$F$1];IF(ISNA([.$W373]);&quot;null&quot;;&quot;&quot;&quot;&quot;&amp;[.$W373]&amp;&quot;&quot;&quot;&quot;);[$JSON.$G$1];[.$Y373];[$JSON.$H$1];[.$H373];[$JSON.$I$1];[.J373];[$JSON.$J$1];[.$L373];[$JSON.$K$1];[.$O373];[$JSON.$L$1];[.$N373];[$JSON.$M$1];[.$R373];[$JSON.$N$1];[.$T373];[$JSON.$O$1];IF(ISNA([.$V373]);&quot;null&quot;;[.$V373]);[$JSON.$P$1];[.$X373];[$JSON.$Q$1];[.$A373];[$JSON.$R$1];[.$B373];[$JSON.$S$1])" office:value-type="string" office:string-value="{&quot;id&quot;:&quot;4-64&quot;,&quot;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orderTable&quot;:373,&quot;orderDeck&quot;:290}," calcext:value-type="string">
            <text:p>{"id":"4-64","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G374];[$収録番号.$A$1:$収録番号.$B$9];2;0)" office:value-type="float" office:value="45" calcext:value-type="float">
            <text:p>45</text:p>
          </table:table-cell>
          <table:table-cell office:value-type="string" calcext:value-type="string">
            <text:p>N</text:p>
          </table:table-cell>
          <table:table-cell table:formula="of:=VLOOKUP([.I374];[$レアリティ番号.$A$1:$レアリティ番号.$B$4];2;0)" office:value-type="float" office:value="1" calcext:value-type="float">
            <text:p>1</text:p>
          </table:table-cell>
          <table:table-cell office:value-type="string" calcext:value-type="string">
            <text:p>マホウ</text:p>
          </table:table-cell>
          <table:table-cell table:formula="of:=VLOOKUP([.K374];[$種類番号.$A$1:$種類番号.$B$4];2;0)" office:value-type="float" office:value="3" calcext:value-type="float">
            <text:p>3</text:p>
          </table:table-cell>
          <table:table-cell office:value-type="string" calcext:value-type="string">
            <text:p>無色</text:p>
          </table:table-cell>
          <table:table-cell table:formula="of:=VLOOKUP([.M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Q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S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formula="of:=NA()" office:value-type="string" office:string-value="" calcext:value-type="error">
            <text:p>#N/A</text:p>
          </table:table-cell>
          <table:table-cell table:style-name="ce8" office:value-type="string" calcext:value-type="string">
            <text:p>冥府発動</text:p>
          </table:table-cell>
          <table:table-cell table:formula="of:=IFERROR(VLOOKUP([.$W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IF(ISNA([.$S374]);&quot;null&quot;;&quot;&quot;&quot;&quot;&amp;[.$S374]&amp;&quot;&quot;&quot;&quot;);[$JSON.$E$1];[.$U374];[$JSON.$F$1];IF(ISNA([.$W374]);&quot;null&quot;;&quot;&quot;&quot;&quot;&amp;[.$W374]&amp;&quot;&quot;&quot;&quot;);[$JSON.$G$1];[.$Y374];[$JSON.$H$1];[.$H374];[$JSON.$I$1];[.J374];[$JSON.$J$1];[.$L374];[$JSON.$K$1];[.$O374];[$JSON.$L$1];[.$N374];[$JSON.$M$1];[.$R374];[$JSON.$N$1];[.$T374];[$JSON.$O$1];IF(ISNA([.$V374]);&quot;null&quot;;[.$V374]);[$JSON.$P$1];[.$X374];[$JSON.$Q$1];[.$A374];[$JSON.$R$1];[.$B374];[$JSON.$S$1])" office:value-type="string" office:string-value="{&quot;id&quot;:&quot;4-65&quot;,&quot;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orderTable&quot;:374,&quot;orderDeck&quot;:291}," calcext:value-type="string">
            <text:p>{"id":"4-65","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G375];[$収録番号.$A$1:$収録番号.$B$9];2;0)" office:value-type="float" office:value="45" calcext:value-type="float">
            <text:p>45</text:p>
          </table:table-cell>
          <table:table-cell office:value-type="string" calcext:value-type="string">
            <text:p>R</text:p>
          </table:table-cell>
          <table:table-cell table:formula="of:=VLOOKUP([.I375];[$レアリティ番号.$A$1:$レアリティ番号.$B$4];2;0)" office:value-type="float" office:value="2" calcext:value-type="float">
            <text:p>2</text:p>
          </table:table-cell>
          <table:table-cell office:value-type="string" calcext:value-type="string">
            <text:p>マリョク</text:p>
          </table:table-cell>
          <table:table-cell table:formula="of:=VLOOKUP([.K375];[$種類番号.$A$1:$種類番号.$B$4];2;0)" office:value-type="float" office:value="4" calcext:value-type="float">
            <text:p>4</text:p>
          </table:table-cell>
          <table:table-cell office:value-type="string" calcext:value-type="string">
            <text:p>赤</text:p>
          </table:table-cell>
          <table:table-cell table:formula="of:=VLOOKUP([.M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formula="of:=NA()" office:value-type="string" office:string-value="" calcext:value-type="error">
            <text:p>#N/A</text:p>
          </table:table-cell>
          <table:table-cell table:style-name="ce8" office:value-type="string" calcext:value-type="string">
            <text:p>喪神</text:p>
          </table:table-cell>
          <table:table-cell table:formula="of:=IFERROR(VLOOKUP([.$W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IF(ISNA([.$S375]);&quot;null&quot;;&quot;&quot;&quot;&quot;&amp;[.$S375]&amp;&quot;&quot;&quot;&quot;);[$JSON.$E$1];[.$U375];[$JSON.$F$1];IF(ISNA([.$W375]);&quot;null&quot;;&quot;&quot;&quot;&quot;&amp;[.$W375]&amp;&quot;&quot;&quot;&quot;);[$JSON.$G$1];[.$Y375];[$JSON.$H$1];[.$H375];[$JSON.$I$1];[.J375];[$JSON.$J$1];[.$L375];[$JSON.$K$1];[.$O375];[$JSON.$L$1];[.$N375];[$JSON.$M$1];[.$R375];[$JSON.$N$1];[.$T375];[$JSON.$O$1];IF(ISNA([.$V375]);&quot;null&quot;;[.$V375]);[$JSON.$P$1];[.$X375];[$JSON.$Q$1];[.$A375];[$JSON.$R$1];[.$B375];[$JSON.$S$1])" office:value-type="string" office:string-value="{&quot;id&quot;:&quot;4-66&quot;,&quot;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orderTable&quot;:375,&quot;orderDeck&quot;:348}," calcext:value-type="string">
            <text:p>{"id":"4-66","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G376];[$収録番号.$A$1:$収録番号.$B$9];2;0)" office:value-type="float" office:value="45" calcext:value-type="float">
            <text:p>45</text:p>
          </table:table-cell>
          <table:table-cell office:value-type="string" calcext:value-type="string">
            <text:p>N</text:p>
          </table:table-cell>
          <table:table-cell table:formula="of:=VLOOKUP([.I376];[$レアリティ番号.$A$1:$レアリティ番号.$B$4];2;0)" office:value-type="float" office:value="1" calcext:value-type="float">
            <text:p>1</text:p>
          </table:table-cell>
          <table:table-cell office:value-type="string" calcext:value-type="string">
            <text:p>マリョク</text:p>
          </table:table-cell>
          <table:table-cell table:formula="of:=VLOOKUP([.K376];[$種類番号.$A$1:$種類番号.$B$4];2;0)" office:value-type="float" office:value="4" calcext:value-type="float">
            <text:p>4</text:p>
          </table:table-cell>
          <table:table-cell office:value-type="string" calcext:value-type="string">
            <text:p>赤</text:p>
          </table:table-cell>
          <table:table-cell table:formula="of:=VLOOKUP([.M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IF(ISNA([.$S376]);&quot;null&quot;;&quot;&quot;&quot;&quot;&amp;[.$S376]&amp;&quot;&quot;&quot;&quot;);[$JSON.$E$1];[.$U376];[$JSON.$F$1];IF(ISNA([.$W376]);&quot;null&quot;;&quot;&quot;&quot;&quot;&amp;[.$W376]&amp;&quot;&quot;&quot;&quot;);[$JSON.$G$1];[.$Y376];[$JSON.$H$1];[.$H376];[$JSON.$I$1];[.J376];[$JSON.$J$1];[.$L376];[$JSON.$K$1];[.$O376];[$JSON.$L$1];[.$N376];[$JSON.$M$1];[.$R376];[$JSON.$N$1];[.$T376];[$JSON.$O$1];IF(ISNA([.$V376]);&quot;null&quot;;[.$V376]);[$JSON.$P$1];[.$X376];[$JSON.$Q$1];[.$A376];[$JSON.$R$1];[.$B376];[$JSON.$S$1])" office:value-type="string" office:string-value="{&quot;id&quot;:&quot;4-67&quot;,&quot;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orderTable&quot;:376,&quot;orderDeck&quot;:337}," calcext:value-type="string">
            <text:p>{"id":"4-67","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G377];[$収録番号.$A$1:$収録番号.$B$9];2;0)" office:value-type="float" office:value="45" calcext:value-type="float">
            <text:p>45</text:p>
          </table:table-cell>
          <table:table-cell office:value-type="string" calcext:value-type="string">
            <text:p>R</text:p>
          </table:table-cell>
          <table:table-cell table:formula="of:=VLOOKUP([.I377];[$レアリティ番号.$A$1:$レアリティ番号.$B$4];2;0)" office:value-type="float" office:value="2" calcext:value-type="float">
            <text:p>2</text:p>
          </table:table-cell>
          <table:table-cell office:value-type="string" calcext:value-type="string">
            <text:p>マリョク</text:p>
          </table:table-cell>
          <table:table-cell table:formula="of:=VLOOKUP([.K377];[$種類番号.$A$1:$種類番号.$B$4];2;0)" office:value-type="float" office:value="4" calcext:value-type="float">
            <text:p>4</text:p>
          </table:table-cell>
          <table:table-cell office:value-type="string" calcext:value-type="string">
            <text:p>青</text:p>
          </table:table-cell>
          <table:table-cell table:formula="of:=VLOOKUP([.M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formula="of:=NA()" office:value-type="string" office:string-value="" calcext:value-type="error">
            <text:p>#N/A</text:p>
          </table:table-cell>
          <table:table-cell table:style-name="ce8" office:value-type="string" calcext:value-type="string">
            <text:p>喪神</text:p>
          </table:table-cell>
          <table:table-cell table:formula="of:=IFERROR(VLOOKUP([.$W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IF(ISNA([.$S377]);&quot;null&quot;;&quot;&quot;&quot;&quot;&amp;[.$S377]&amp;&quot;&quot;&quot;&quot;);[$JSON.$E$1];[.$U377];[$JSON.$F$1];IF(ISNA([.$W377]);&quot;null&quot;;&quot;&quot;&quot;&quot;&amp;[.$W377]&amp;&quot;&quot;&quot;&quot;);[$JSON.$G$1];[.$Y377];[$JSON.$H$1];[.$H377];[$JSON.$I$1];[.J377];[$JSON.$J$1];[.$L377];[$JSON.$K$1];[.$O377];[$JSON.$L$1];[.$N377];[$JSON.$M$1];[.$R377];[$JSON.$N$1];[.$T377];[$JSON.$O$1];IF(ISNA([.$V377]);&quot;null&quot;;[.$V377]);[$JSON.$P$1];[.$X377];[$JSON.$Q$1];[.$A377];[$JSON.$R$1];[.$B377];[$JSON.$S$1])" office:value-type="string" office:string-value="{&quot;id&quot;:&quot;4-68&quot;,&quot;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orderTable&quot;:377,&quot;orderDeck&quot;:354}," calcext:value-type="string">
            <text:p>{"id":"4-68","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G378];[$収録番号.$A$1:$収録番号.$B$9];2;0)" office:value-type="float" office:value="45" calcext:value-type="float">
            <text:p>45</text:p>
          </table:table-cell>
          <table:table-cell office:value-type="string" calcext:value-type="string">
            <text:p>N</text:p>
          </table:table-cell>
          <table:table-cell table:formula="of:=VLOOKUP([.I378];[$レアリティ番号.$A$1:$レアリティ番号.$B$4];2;0)" office:value-type="float" office:value="1" calcext:value-type="float">
            <text:p>1</text:p>
          </table:table-cell>
          <table:table-cell office:value-type="string" calcext:value-type="string">
            <text:p>マリョク</text:p>
          </table:table-cell>
          <table:table-cell table:formula="of:=VLOOKUP([.K378];[$種類番号.$A$1:$種類番号.$B$4];2;0)" office:value-type="float" office:value="4" calcext:value-type="float">
            <text:p>4</text:p>
          </table:table-cell>
          <table:table-cell office:value-type="string" calcext:value-type="string">
            <text:p>青</text:p>
          </table:table-cell>
          <table:table-cell table:formula="of:=VLOOKUP([.M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IF(ISNA([.$S378]);&quot;null&quot;;&quot;&quot;&quot;&quot;&amp;[.$S378]&amp;&quot;&quot;&quot;&quot;);[$JSON.$E$1];[.$U378];[$JSON.$F$1];IF(ISNA([.$W378]);&quot;null&quot;;&quot;&quot;&quot;&quot;&amp;[.$W378]&amp;&quot;&quot;&quot;&quot;);[$JSON.$G$1];[.$Y378];[$JSON.$H$1];[.$H378];[$JSON.$I$1];[.J378];[$JSON.$J$1];[.$L378];[$JSON.$K$1];[.$O378];[$JSON.$L$1];[.$N378];[$JSON.$M$1];[.$R378];[$JSON.$N$1];[.$T378];[$JSON.$O$1];IF(ISNA([.$V378]);&quot;null&quot;;[.$V378]);[$JSON.$P$1];[.$X378];[$JSON.$Q$1];[.$A378];[$JSON.$R$1];[.$B378];[$JSON.$S$1])" office:value-type="string" office:string-value="{&quot;id&quot;:&quot;4-69&quot;,&quot;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orderTable&quot;:378,&quot;orderDeck&quot;:338}," calcext:value-type="string">
            <text:p>{"id":"4-69","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G379];[$収録番号.$A$1:$収録番号.$B$9];2;0)" office:value-type="float" office:value="45" calcext:value-type="float">
            <text:p>45</text:p>
          </table:table-cell>
          <table:table-cell office:value-type="string" calcext:value-type="string">
            <text:p>R</text:p>
          </table:table-cell>
          <table:table-cell table:formula="of:=VLOOKUP([.I379];[$レアリティ番号.$A$1:$レアリティ番号.$B$4];2;0)" office:value-type="float" office:value="2" calcext:value-type="float">
            <text:p>2</text:p>
          </table:table-cell>
          <table:table-cell office:value-type="string" calcext:value-type="string">
            <text:p>マリョク</text:p>
          </table:table-cell>
          <table:table-cell table:formula="of:=VLOOKUP([.K379];[$種類番号.$A$1:$種類番号.$B$4];2;0)" office:value-type="float" office:value="4" calcext:value-type="float">
            <text:p>4</text:p>
          </table:table-cell>
          <table:table-cell office:value-type="string" calcext:value-type="string">
            <text:p>緑</text:p>
          </table:table-cell>
          <table:table-cell table:formula="of:=VLOOKUP([.M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formula="of:=NA()" office:value-type="string" office:string-value="" calcext:value-type="error">
            <text:p>#N/A</text:p>
          </table:table-cell>
          <table:table-cell table:style-name="ce8" office:value-type="string" calcext:value-type="string">
            <text:p>喪神</text:p>
          </table:table-cell>
          <table:table-cell table:formula="of:=IFERROR(VLOOKUP([.$W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IF(ISNA([.$S379]);&quot;null&quot;;&quot;&quot;&quot;&quot;&amp;[.$S379]&amp;&quot;&quot;&quot;&quot;);[$JSON.$E$1];[.$U379];[$JSON.$F$1];IF(ISNA([.$W379]);&quot;null&quot;;&quot;&quot;&quot;&quot;&amp;[.$W379]&amp;&quot;&quot;&quot;&quot;);[$JSON.$G$1];[.$Y379];[$JSON.$H$1];[.$H379];[$JSON.$I$1];[.J379];[$JSON.$J$1];[.$L379];[$JSON.$K$1];[.$O379];[$JSON.$L$1];[.$N379];[$JSON.$M$1];[.$R379];[$JSON.$N$1];[.$T379];[$JSON.$O$1];IF(ISNA([.$V379]);&quot;null&quot;;[.$V379]);[$JSON.$P$1];[.$X379];[$JSON.$Q$1];[.$A379];[$JSON.$R$1];[.$B379];[$JSON.$S$1])" office:value-type="string" office:string-value="{&quot;id&quot;:&quot;4-70&quot;,&quot;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orderTable&quot;:379,&quot;orderDeck&quot;:360}," calcext:value-type="string">
            <text:p>{"id":"4-70","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G380];[$収録番号.$A$1:$収録番号.$B$9];2;0)" office:value-type="float" office:value="45" calcext:value-type="float">
            <text:p>45</text:p>
          </table:table-cell>
          <table:table-cell office:value-type="string" calcext:value-type="string">
            <text:p>N</text:p>
          </table:table-cell>
          <table:table-cell table:formula="of:=VLOOKUP([.I380];[$レアリティ番号.$A$1:$レアリティ番号.$B$4];2;0)" office:value-type="float" office:value="1" calcext:value-type="float">
            <text:p>1</text:p>
          </table:table-cell>
          <table:table-cell office:value-type="string" calcext:value-type="string">
            <text:p>マリョク</text:p>
          </table:table-cell>
          <table:table-cell table:formula="of:=VLOOKUP([.K380];[$種類番号.$A$1:$種類番号.$B$4];2;0)" office:value-type="float" office:value="4" calcext:value-type="float">
            <text:p>4</text:p>
          </table:table-cell>
          <table:table-cell office:value-type="string" calcext:value-type="string">
            <text:p>緑</text:p>
          </table:table-cell>
          <table:table-cell table:formula="of:=VLOOKUP([.M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IF(ISNA([.$S380]);&quot;null&quot;;&quot;&quot;&quot;&quot;&amp;[.$S380]&amp;&quot;&quot;&quot;&quot;);[$JSON.$E$1];[.$U380];[$JSON.$F$1];IF(ISNA([.$W380]);&quot;null&quot;;&quot;&quot;&quot;&quot;&amp;[.$W380]&amp;&quot;&quot;&quot;&quot;);[$JSON.$G$1];[.$Y380];[$JSON.$H$1];[.$H380];[$JSON.$I$1];[.J380];[$JSON.$J$1];[.$L380];[$JSON.$K$1];[.$O380];[$JSON.$L$1];[.$N380];[$JSON.$M$1];[.$R380];[$JSON.$N$1];[.$T380];[$JSON.$O$1];IF(ISNA([.$V380]);&quot;null&quot;;[.$V380]);[$JSON.$P$1];[.$X380];[$JSON.$Q$1];[.$A380];[$JSON.$R$1];[.$B380];[$JSON.$S$1])" office:value-type="string" office:string-value="{&quot;id&quot;:&quot;4-71&quot;,&quot;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orderTable&quot;:380,&quot;orderDeck&quot;:339}," calcext:value-type="string">
            <text:p>{"id":"4-71","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G381];[$収録番号.$A$1:$収録番号.$B$9];2;0)" office:value-type="float" office:value="45" calcext:value-type="float">
            <text:p>45</text:p>
          </table:table-cell>
          <table:table-cell office:value-type="string" calcext:value-type="string">
            <text:p>N</text:p>
          </table:table-cell>
          <table:table-cell table:formula="of:=VLOOKUP([.I381];[$レアリティ番号.$A$1:$レアリティ番号.$B$4];2;0)" office:value-type="float" office:value="1" calcext:value-type="float">
            <text:p>1</text:p>
          </table:table-cell>
          <table:table-cell office:value-type="string" calcext:value-type="string">
            <text:p>マリョク</text:p>
          </table:table-cell>
          <table:table-cell table:formula="of:=VLOOKUP([.K381];[$種類番号.$A$1:$種類番号.$B$4];2;0)" office:value-type="float" office:value="4" calcext:value-type="float">
            <text:p>4</text:p>
          </table:table-cell>
          <table:table-cell office:value-type="string" calcext:value-type="string">
            <text:p>黄</text:p>
          </table:table-cell>
          <table:table-cell table:formula="of:=VLOOKUP([.M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IF(ISNA([.$S381]);&quot;null&quot;;&quot;&quot;&quot;&quot;&amp;[.$S381]&amp;&quot;&quot;&quot;&quot;);[$JSON.$E$1];[.$U381];[$JSON.$F$1];IF(ISNA([.$W381]);&quot;null&quot;;&quot;&quot;&quot;&quot;&amp;[.$W381]&amp;&quot;&quot;&quot;&quot;);[$JSON.$G$1];[.$Y381];[$JSON.$H$1];[.$H381];[$JSON.$I$1];[.J381];[$JSON.$J$1];[.$L381];[$JSON.$K$1];[.$O381];[$JSON.$L$1];[.$N381];[$JSON.$M$1];[.$R381];[$JSON.$N$1];[.$T381];[$JSON.$O$1];IF(ISNA([.$V381]);&quot;null&quot;;[.$V381]);[$JSON.$P$1];[.$X381];[$JSON.$Q$1];[.$A381];[$JSON.$R$1];[.$B381];[$JSON.$S$1])" office:value-type="string" office:string-value="{&quot;id&quot;:&quot;4-72&quot;,&quot;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orderTable&quot;:381,&quot;orderDeck&quot;:365}," calcext:value-type="string">
            <text:p>{"id":"4-72","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G382];[$収録番号.$A$1:$収録番号.$B$9];2;0)" office:value-type="float" office:value="45" calcext:value-type="float">
            <text:p>45</text:p>
          </table:table-cell>
          <table:table-cell office:value-type="string" calcext:value-type="string">
            <text:p>N</text:p>
          </table:table-cell>
          <table:table-cell table:formula="of:=VLOOKUP([.I382];[$レアリティ番号.$A$1:$レアリティ番号.$B$4];2;0)" office:value-type="float" office:value="1" calcext:value-type="float">
            <text:p>1</text:p>
          </table:table-cell>
          <table:table-cell office:value-type="string" calcext:value-type="string">
            <text:p>マリョク</text:p>
          </table:table-cell>
          <table:table-cell table:formula="of:=VLOOKUP([.K382];[$種類番号.$A$1:$種類番号.$B$4];2;0)" office:value-type="float" office:value="4" calcext:value-type="float">
            <text:p>4</text:p>
          </table:table-cell>
          <table:table-cell office:value-type="string" calcext:value-type="string">
            <text:p>黄</text:p>
          </table:table-cell>
          <table:table-cell table:formula="of:=VLOOKUP([.M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IF(ISNA([.$S382]);&quot;null&quot;;&quot;&quot;&quot;&quot;&amp;[.$S382]&amp;&quot;&quot;&quot;&quot;);[$JSON.$E$1];[.$U382];[$JSON.$F$1];IF(ISNA([.$W382]);&quot;null&quot;;&quot;&quot;&quot;&quot;&amp;[.$W382]&amp;&quot;&quot;&quot;&quot;);[$JSON.$G$1];[.$Y382];[$JSON.$H$1];[.$H382];[$JSON.$I$1];[.J382];[$JSON.$J$1];[.$L382];[$JSON.$K$1];[.$O382];[$JSON.$L$1];[.$N382];[$JSON.$M$1];[.$R382];[$JSON.$N$1];[.$T382];[$JSON.$O$1];IF(ISNA([.$V382]);&quot;null&quot;;[.$V382]);[$JSON.$P$1];[.$X382];[$JSON.$Q$1];[.$A382];[$JSON.$R$1];[.$B382];[$JSON.$S$1])" office:value-type="string" office:string-value="{&quot;id&quot;:&quot;4-73&quot;,&quot;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orderTable&quot;:382,&quot;orderDeck&quot;:340}," calcext:value-type="string">
            <text:p>{"id":"4-73","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G383];[$収録番号.$A$1:$収録番号.$B$9];2;0)" office:value-type="float" office:value="45" calcext:value-type="float">
            <text:p>45</text:p>
          </table:table-cell>
          <table:table-cell office:value-type="string" calcext:value-type="string">
            <text:p>N</text:p>
          </table:table-cell>
          <table:table-cell table:formula="of:=VLOOKUP([.I383];[$レアリティ番号.$A$1:$レアリティ番号.$B$4];2;0)" office:value-type="float" office:value="1" calcext:value-type="float">
            <text:p>1</text:p>
          </table:table-cell>
          <table:table-cell office:value-type="string" calcext:value-type="string">
            <text:p>マリョク</text:p>
          </table:table-cell>
          <table:table-cell table:formula="of:=VLOOKUP([.K383];[$種類番号.$A$1:$種類番号.$B$4];2;0)" office:value-type="float" office:value="4" calcext:value-type="float">
            <text:p>4</text:p>
          </table:table-cell>
          <table:table-cell office:value-type="string" calcext:value-type="string">
            <text:p>紫</text:p>
          </table:table-cell>
          <table:table-cell table:formula="of:=VLOOKUP([.M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IF(ISNA([.$S383]);&quot;null&quot;;&quot;&quot;&quot;&quot;&amp;[.$S383]&amp;&quot;&quot;&quot;&quot;);[$JSON.$E$1];[.$U383];[$JSON.$F$1];IF(ISNA([.$W383]);&quot;null&quot;;&quot;&quot;&quot;&quot;&amp;[.$W383]&amp;&quot;&quot;&quot;&quot;);[$JSON.$G$1];[.$Y383];[$JSON.$H$1];[.$H383];[$JSON.$I$1];[.J383];[$JSON.$J$1];[.$L383];[$JSON.$K$1];[.$O383];[$JSON.$L$1];[.$N383];[$JSON.$M$1];[.$R383];[$JSON.$N$1];[.$T383];[$JSON.$O$1];IF(ISNA([.$V383]);&quot;null&quot;;[.$V383]);[$JSON.$P$1];[.$X383];[$JSON.$Q$1];[.$A383];[$JSON.$R$1];[.$B383];[$JSON.$S$1])" office:value-type="string" office:string-value="{&quot;id&quot;:&quot;4-74&quot;,&quot;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orderTable&quot;:383,&quot;orderDeck&quot;:371}," calcext:value-type="string">
            <text:p>{"id":"4-74","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G384];[$収録番号.$A$1:$収録番号.$B$9];2;0)" office:value-type="float" office:value="45" calcext:value-type="float">
            <text:p>45</text:p>
          </table:table-cell>
          <table:table-cell office:value-type="string" calcext:value-type="string">
            <text:p>N</text:p>
          </table:table-cell>
          <table:table-cell table:formula="of:=VLOOKUP([.I384];[$レアリティ番号.$A$1:$レアリティ番号.$B$4];2;0)" office:value-type="float" office:value="1" calcext:value-type="float">
            <text:p>1</text:p>
          </table:table-cell>
          <table:table-cell office:value-type="string" calcext:value-type="string">
            <text:p>マリョク</text:p>
          </table:table-cell>
          <table:table-cell table:formula="of:=VLOOKUP([.K384];[$種類番号.$A$1:$種類番号.$B$4];2;0)" office:value-type="float" office:value="4" calcext:value-type="float">
            <text:p>4</text:p>
          </table:table-cell>
          <table:table-cell office:value-type="string" calcext:value-type="string">
            <text:p>紫</text:p>
          </table:table-cell>
          <table:table-cell table:formula="of:=VLOOKUP([.M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8" office:value-type="string" calcext:value-type="string">
            <text:p>手札に戻す</text:p>
          </table:table-cell>
          <table:table-cell table:formula="of:=IFERROR(VLOOKUP([.$W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IF(ISNA([.$S384]);&quot;null&quot;;&quot;&quot;&quot;&quot;&amp;[.$S384]&amp;&quot;&quot;&quot;&quot;);[$JSON.$E$1];[.$U384];[$JSON.$F$1];IF(ISNA([.$W384]);&quot;null&quot;;&quot;&quot;&quot;&quot;&amp;[.$W384]&amp;&quot;&quot;&quot;&quot;);[$JSON.$G$1];[.$Y384];[$JSON.$H$1];[.$H384];[$JSON.$I$1];[.J384];[$JSON.$J$1];[.$L384];[$JSON.$K$1];[.$O384];[$JSON.$L$1];[.$N384];[$JSON.$M$1];[.$R384];[$JSON.$N$1];[.$T384];[$JSON.$O$1];IF(ISNA([.$V384]);&quot;null&quot;;[.$V384]);[$JSON.$P$1];[.$X384];[$JSON.$Q$1];[.$A384];[$JSON.$R$1];[.$B384];[$JSON.$S$1])" office:value-type="string" office:string-value="{&quot;id&quot;:&quot;4-75&quot;,&quot;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orderTable&quot;:384,&quot;orderDeck&quot;:341}," calcext:value-type="string">
            <text:p>{"id":"4-75","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G385];[$収録番号.$A$1:$収録番号.$B$9];2;0)" office:value-type="float" office:value="45" calcext:value-type="float">
            <text:p>45</text:p>
          </table:table-cell>
          <table:table-cell office:value-type="string" calcext:value-type="string">
            <text:p>N</text:p>
          </table:table-cell>
          <table:table-cell table:formula="of:=VLOOKUP([.I385];[$レアリティ番号.$A$1:$レアリティ番号.$B$4];2;0)" office:value-type="float" office:value="1" calcext:value-type="float">
            <text:p>1</text:p>
          </table:table-cell>
          <table:table-cell office:value-type="string" calcext:value-type="string">
            <text:p>マリョク</text:p>
          </table:table-cell>
          <table:table-cell table:formula="of:=VLOOKUP([.K385];[$種類番号.$A$1:$種類番号.$B$4];2;0)" office:value-type="float" office:value="4" calcext:value-type="float">
            <text:p>4</text:p>
          </table:table-cell>
          <table:table-cell office:value-type="string" calcext:value-type="string">
            <text:p>無色</text:p>
          </table:table-cell>
          <table:table-cell table:formula="of:=VLOOKUP([.M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formula="of:=NA()" office:value-type="string" office:string-value="" calcext:value-type="error">
            <text:p>#N/A</text:p>
          </table:table-cell>
          <table:table-cell table:style-name="ce8" office:value-type="string" calcext:value-type="string">
            <text:p>1ドローする</text:p>
          </table:table-cell>
          <table:table-cell table:formula="of:=IFERROR(VLOOKUP([.$W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IF(ISNA([.$S385]);&quot;null&quot;;&quot;&quot;&quot;&quot;&amp;[.$S385]&amp;&quot;&quot;&quot;&quot;);[$JSON.$E$1];[.$U385];[$JSON.$F$1];IF(ISNA([.$W385]);&quot;null&quot;;&quot;&quot;&quot;&quot;&amp;[.$W385]&amp;&quot;&quot;&quot;&quot;);[$JSON.$G$1];[.$Y385];[$JSON.$H$1];[.$H385];[$JSON.$I$1];[.J385];[$JSON.$J$1];[.$L385];[$JSON.$K$1];[.$O385];[$JSON.$L$1];[.$N385];[$JSON.$M$1];[.$R385];[$JSON.$N$1];[.$T385];[$JSON.$O$1];IF(ISNA([.$V385]);&quot;null&quot;;[.$V385]);[$JSON.$P$1];[.$X385];[$JSON.$Q$1];[.$A385];[$JSON.$R$1];[.$B385];[$JSON.$S$1])" office:value-type="string" office:string-value="{&quot;id&quot;:&quot;4-76&quot;,&quot;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orderTable&quot;:385,&quot;orderDeck&quot;:377}," calcext:value-type="string">
            <text:p>{"id":"4-76","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G386];[$収録番号.$A$1:$収録番号.$B$9];2;0)" office:value-type="float" office:value="45" calcext:value-type="float">
            <text:p>45</text:p>
          </table:table-cell>
          <table:table-cell office:value-type="string" calcext:value-type="string">
            <text:p>R</text:p>
          </table:table-cell>
          <table:table-cell table:formula="of:=VLOOKUP([.I386];[$レアリティ番号.$A$1:$レアリティ番号.$B$4];2;0)" office:value-type="float" office:value="2" calcext:value-type="float">
            <text:p>2</text:p>
          </table:table-cell>
          <table:table-cell office:value-type="string" calcext:value-type="string">
            <text:p>マリョク</text:p>
          </table:table-cell>
          <table:table-cell table:formula="of:=VLOOKUP([.K386];[$種類番号.$A$1:$種類番号.$B$4];2;0)" office:value-type="float" office:value="4" calcext:value-type="float">
            <text:p>4</text:p>
          </table:table-cell>
          <table:table-cell office:value-type="string" calcext:value-type="string">
            <text:p>無色</text:p>
          </table:table-cell>
          <table:table-cell table:formula="of:=VLOOKUP([.M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IF(ISNA([.$S386]);&quot;null&quot;;&quot;&quot;&quot;&quot;&amp;[.$S386]&amp;&quot;&quot;&quot;&quot;);[$JSON.$E$1];[.$U386];[$JSON.$F$1];IF(ISNA([.$W386]);&quot;null&quot;;&quot;&quot;&quot;&quot;&amp;[.$W386]&amp;&quot;&quot;&quot;&quot;);[$JSON.$G$1];[.$Y386];[$JSON.$H$1];[.$H386];[$JSON.$I$1];[.J386];[$JSON.$J$1];[.$L386];[$JSON.$K$1];[.$O386];[$JSON.$L$1];[.$N386];[$JSON.$M$1];[.$R386];[$JSON.$N$1];[.$T386];[$JSON.$O$1];IF(ISNA([.$V386]);&quot;null&quot;;[.$V386]);[$JSON.$P$1];[.$X386];[$JSON.$Q$1];[.$A386];[$JSON.$R$1];[.$B386];[$JSON.$S$1])" office:value-type="string" office:string-value="{&quot;id&quot;:&quot;4-77&quot;,&quot;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orderTable&quot;:386,&quot;orderDeck&quot;:387}," calcext:value-type="string">
            <text:p>{"id":"4-77","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G387];[$収録番号.$A$1:$収録番号.$B$9];2;0)" office:value-type="float" office:value="45" calcext:value-type="float">
            <text:p>45</text:p>
          </table:table-cell>
          <table:table-cell office:value-type="string" calcext:value-type="string">
            <text:p>N</text:p>
          </table:table-cell>
          <table:table-cell table:formula="of:=VLOOKUP([.I387];[$レアリティ番号.$A$1:$レアリティ番号.$B$4];2;0)" office:value-type="float" office:value="1" calcext:value-type="float">
            <text:p>1</text:p>
          </table:table-cell>
          <table:table-cell office:value-type="string" calcext:value-type="string">
            <text:p>マリョク</text:p>
          </table:table-cell>
          <table:table-cell table:formula="of:=VLOOKUP([.K387];[$種類番号.$A$1:$種類番号.$B$4];2;0)" office:value-type="float" office:value="4" calcext:value-type="float">
            <text:p>4</text:p>
          </table:table-cell>
          <table:table-cell office:value-type="string" calcext:value-type="string">
            <text:p>無色</text:p>
          </table:table-cell>
          <table:table-cell table:formula="of:=VLOOKUP([.M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formula="of:=NA()" office:value-type="string" office:string-value="" calcext:value-type="error">
            <text:p>#N/A</text:p>
          </table:table-cell>
          <table:table-cell table:style-name="ce8" office:value-type="string" calcext:value-type="string">
            <text:p>復元</text:p>
          </table:table-cell>
          <table:table-cell table:formula="of:=IFERROR(VLOOKUP([.$W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IF(ISNA([.$S387]);&quot;null&quot;;&quot;&quot;&quot;&quot;&amp;[.$S387]&amp;&quot;&quot;&quot;&quot;);[$JSON.$E$1];[.$U387];[$JSON.$F$1];IF(ISNA([.$W387]);&quot;null&quot;;&quot;&quot;&quot;&quot;&amp;[.$W387]&amp;&quot;&quot;&quot;&quot;);[$JSON.$G$1];[.$Y387];[$JSON.$H$1];[.$H387];[$JSON.$I$1];[.J387];[$JSON.$J$1];[.$L387];[$JSON.$K$1];[.$O387];[$JSON.$L$1];[.$N387];[$JSON.$M$1];[.$R387];[$JSON.$N$1];[.$T387];[$JSON.$O$1];IF(ISNA([.$V387]);&quot;null&quot;;[.$V387]);[$JSON.$P$1];[.$X387];[$JSON.$Q$1];[.$A387];[$JSON.$R$1];[.$B387];[$JSON.$S$1])" office:value-type="string" office:string-value="{&quot;id&quot;:&quot;4-78&quot;,&quot;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orderTable&quot;:387,&quot;orderDeck&quot;:388}," calcext:value-type="string">
            <text:p>{"id":"4-78","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G388];[$収録番号.$A$1:$収録番号.$B$9];2;0)" office:value-type="float" office:value="45" calcext:value-type="float">
            <text:p>45</text:p>
          </table:table-cell>
          <table:table-cell office:value-type="string" calcext:value-type="string">
            <text:p>N</text:p>
          </table:table-cell>
          <table:table-cell table:formula="of:=VLOOKUP([.I388];[$レアリティ番号.$A$1:$レアリティ番号.$B$4];2;0)" office:value-type="float" office:value="1" calcext:value-type="float">
            <text:p>1</text:p>
          </table:table-cell>
          <table:table-cell office:value-type="string" calcext:value-type="string">
            <text:p>マリョク</text:p>
          </table:table-cell>
          <table:table-cell table:formula="of:=VLOOKUP([.K388];[$種類番号.$A$1:$種類番号.$B$4];2;0)" office:value-type="float" office:value="4" calcext:value-type="float">
            <text:p>4</text:p>
          </table:table-cell>
          <table:table-cell office:value-type="string" calcext:value-type="string">
            <text:p>無色</text:p>
          </table:table-cell>
          <table:table-cell table:formula="of:=VLOOKUP([.M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IF(ISNA([.$S388]);&quot;null&quot;;&quot;&quot;&quot;&quot;&amp;[.$S388]&amp;&quot;&quot;&quot;&quot;);[$JSON.$E$1];[.$U388];[$JSON.$F$1];IF(ISNA([.$W388]);&quot;null&quot;;&quot;&quot;&quot;&quot;&amp;[.$W388]&amp;&quot;&quot;&quot;&quot;);[$JSON.$G$1];[.$Y388];[$JSON.$H$1];[.$H388];[$JSON.$I$1];[.J388];[$JSON.$J$1];[.$L388];[$JSON.$K$1];[.$O388];[$JSON.$L$1];[.$N388];[$JSON.$M$1];[.$R388];[$JSON.$N$1];[.$T388];[$JSON.$O$1];IF(ISNA([.$V388]);&quot;null&quot;;[.$V388]);[$JSON.$P$1];[.$X388];[$JSON.$Q$1];[.$A388];[$JSON.$R$1];[.$B388];[$JSON.$S$1])" office:value-type="string" office:string-value="{&quot;id&quot;:&quot;4-79&quot;,&quot;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orderTable&quot;:388,&quot;orderDeck&quot;:378}," calcext:value-type="string">
            <text:p>{"id":"4-79","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G389];[$収録番号.$A$1:$収録番号.$B$9];2;0)" office:value-type="float" office:value="45" calcext:value-type="float">
            <text:p>45</text:p>
          </table:table-cell>
          <table:table-cell office:value-type="string" calcext:value-type="string">
            <text:p>R</text:p>
          </table:table-cell>
          <table:table-cell table:formula="of:=VLOOKUP([.I389];[$レアリティ番号.$A$1:$レアリティ番号.$B$4];2;0)" office:value-type="float" office:value="2" calcext:value-type="float">
            <text:p>2</text:p>
          </table:table-cell>
          <table:table-cell office:value-type="string" calcext:value-type="string">
            <text:p>マリョク</text:p>
          </table:table-cell>
          <table:table-cell table:formula="of:=VLOOKUP([.K389];[$種類番号.$A$1:$種類番号.$B$4];2;0)" office:value-type="float" office:value="4" calcext:value-type="float">
            <text:p>4</text:p>
          </table:table-cell>
          <table:table-cell office:value-type="string" calcext:value-type="string">
            <text:p>無色</text:p>
          </table:table-cell>
          <table:table-cell table:formula="of:=VLOOKUP([.M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Q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S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formula="of:=NA()" office:value-type="string" office:string-value="" calcext:value-type="error">
            <text:p>#N/A</text:p>
          </table:table-cell>
          <table:table-cell table:style-name="ce8" office:value-type="string" calcext:value-type="string">
            <text:p>魔力化</text:p>
          </table:table-cell>
          <table:table-cell table:formula="of:=IFERROR(VLOOKUP([.$W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IF(ISNA([.$S389]);&quot;null&quot;;&quot;&quot;&quot;&quot;&amp;[.$S389]&amp;&quot;&quot;&quot;&quot;);[$JSON.$E$1];[.$U389];[$JSON.$F$1];IF(ISNA([.$W389]);&quot;null&quot;;&quot;&quot;&quot;&quot;&amp;[.$W389]&amp;&quot;&quot;&quot;&quot;);[$JSON.$G$1];[.$Y389];[$JSON.$H$1];[.$H389];[$JSON.$I$1];[.J389];[$JSON.$J$1];[.$L389];[$JSON.$K$1];[.$O389];[$JSON.$L$1];[.$N389];[$JSON.$M$1];[.$R389];[$JSON.$N$1];[.$T389];[$JSON.$O$1];IF(ISNA([.$V389]);&quot;null&quot;;[.$V389]);[$JSON.$P$1];[.$X389];[$JSON.$Q$1];[.$A389];[$JSON.$R$1];[.$B389];[$JSON.$S$1])" office:value-type="string" office:string-value="{&quot;id&quot;:&quot;4-80&quot;,&quot;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orderTable&quot;:389,&quot;orderDeck&quot;:389}," calcext:value-type="string">
            <text:p>{"id":"4-80","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orderTable":389,"orderDeck":389},</text:p>
          </table:table-cell>
          <table:table-cell table:number-columns-repeated="16347"/>
        </table:table-row>
        <table:table-row table:style-name="ro2" table:number-rows-repeated="1048186">
          <table:table-cell table:number-columns-repeated="16373"/>
        </table:table-row>
        <table:table-row table:style-name="ro2">
          <table:table-cell table:number-columns-repeated="16373"/>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10" table:default-cell-style-name="Default"/>
        <table:table-column table:style-name="co17"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7"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10"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1"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2"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8" table:default-cell-style-name="Default"/>
        <table:table-column table:style-name="co17"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power"</text:span>:</text:p>
          </table:table-cell>
          <table:table-cell office:value-type="string" calcext:value-type="string">
            <text:p><text:span text:style-name="T1">,"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6"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Z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6:12:15.372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5-14T16:20:48.690000000</dc:date>
    <meta:editing-duration>PT17H44M7S</meta:editing-duration>
    <meta:editing-cycles>460</meta:editing-cycles>
    <meta:generator>LibreOffice/7.5.3.2$Windows_X86_64 LibreOffice_project/9f56dff12ba03b9acd7730a5a481eea045e468f3</meta:generator>
    <meta:document-statistic meta:table-count="10" meta:cell-count="10233" meta:object-count="0"/>
  </office:meta>
</office:document-meta>
</file>