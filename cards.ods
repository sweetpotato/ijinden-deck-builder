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57cm"/>
    </style:style>
    <style:style style:name="co2" style:family="table-column">
      <style:table-column-properties fo:break-before="auto" style:column-width="1.748cm"/>
    </style:style>
    <style:style style:name="co3" style:family="table-column">
      <style:table-column-properties fo:break-before="auto" style:column-width="7.458cm"/>
    </style:style>
    <style:style style:name="co4" style:family="table-column">
      <style:table-column-properties fo:break-before="auto" style:column-width="6.715cm"/>
    </style:style>
    <style:style style:name="co5" style:family="table-column">
      <style:table-column-properties fo:break-before="auto" style:column-width="4.232cm"/>
    </style:style>
    <style:style style:name="co6" style:family="table-column">
      <style:table-column-properties fo:break-before="auto" style:column-width="0.686cm"/>
    </style:style>
    <style:style style:name="co7" style:family="table-column">
      <style:table-column-properties fo:break-before="auto" style:column-width="1.005cm"/>
    </style:style>
    <style:style style:name="co8" style:family="table-column">
      <style:table-column-properties fo:break-before="auto" style:column-width="1.727cm"/>
    </style:style>
    <style:style style:name="co9" style:family="table-column">
      <style:table-column-properties fo:break-before="auto" style:column-width="1.069cm"/>
    </style:style>
    <style:style style:name="co10" style:family="table-column">
      <style:table-column-properties fo:break-before="auto" style:column-width="1.365cm"/>
    </style:style>
    <style:style style:name="co11" style:family="table-column">
      <style:table-column-properties fo:break-before="auto" style:column-width="1.048cm"/>
    </style:style>
    <style:style style:name="co12" style:family="table-column">
      <style:table-column-properties fo:break-before="auto" style:column-width="1.917cm"/>
    </style:style>
    <style:style style:name="co13" style:family="table-column">
      <style:table-column-properties fo:break-before="auto" style:column-width="3.798cm"/>
    </style:style>
    <style:style style:name="co14" style:family="table-column">
      <style:table-column-properties fo:break-before="auto" style:column-width="1.238cm"/>
    </style:style>
    <style:style style:name="co15" style:family="table-column">
      <style:table-column-properties fo:break-before="auto" style:column-width="9.495cm"/>
    </style:style>
    <style:style style:name="co16" style:family="table-column">
      <style:table-column-properties fo:break-before="auto" style:column-width="2.258cm"/>
    </style:style>
    <style:style style:name="co17" style:family="table-column">
      <style:table-column-properties fo:break-before="auto" style:column-width="0.665cm"/>
    </style:style>
    <style:style style:name="co18" style:family="table-column">
      <style:table-column-properties fo:break-before="auto" style:column-width="0.474cm"/>
    </style:style>
    <style:style style:name="co19" style:family="table-column">
      <style:table-column-properties fo:break-before="auto" style:column-width="3.531cm"/>
    </style:style>
    <style:style style:name="co20" style:family="table-column">
      <style:table-column-properties fo:break-before="auto" style:column-width="1.175cm"/>
    </style:style>
    <style:style style:name="co21" style:family="table-column">
      <style:table-column-properties fo:break-before="auto" style:column-width="1.875cm"/>
    </style:style>
    <style:style style:name="co22" style:family="table-column">
      <style:table-column-properties fo:break-before="auto" style:column-width="3.064cm"/>
    </style:style>
    <style:style style:name="co23" style:family="table-column">
      <style:table-column-properties fo:break-before="auto" style:column-width="1.769cm"/>
    </style:style>
    <style:style style:name="co24" style:family="table-column">
      <style:table-column-properties fo:break-before="auto" style:column-width="2.173cm"/>
    </style:style>
    <style:style style:name="co25" style:family="table-column">
      <style:table-column-properties fo:break-before="auto" style:column-width="2.152cm"/>
    </style:style>
    <style:style style:name="co26" style:family="table-column">
      <style:table-column-properties fo:break-before="auto" style:column-width="2.596cm"/>
    </style:style>
    <style:style style:name="co27" style:family="table-column">
      <style:table-column-properties fo:break-before="auto" style:column-width="2.3cm"/>
    </style:style>
    <style:style style:name="co28" style:family="table-column">
      <style:table-column-properties fo:break-before="auto" style:column-width="2.491cm"/>
    </style:style>
    <style:style style:name="co29" style:family="table-column">
      <style:table-column-properties fo:break-before="auto" style:column-width="1.579cm"/>
    </style:style>
    <style:style style:name="co30" style:family="table-column">
      <style:table-column-properties fo:break-before="auto" style:column-width="1.429cm"/>
    </style:style>
    <style:style style:name="co31" style:family="table-column">
      <style:table-column-properties fo:break-before="auto" style:column-width="1.494cm"/>
    </style:style>
    <style:style style:name="co32" style:family="table-column">
      <style:table-column-properties fo:break-before="auto" style:column-width="1.536cm"/>
    </style:style>
    <style:style style:name="co33" style:family="table-column">
      <style:table-column-properties fo:break-before="auto" style:column-width="1.471cm"/>
    </style:style>
    <style:style style:name="co34" style:family="table-column">
      <style:table-column-properties fo:break-before="auto" style:column-width="1.79cm"/>
    </style:style>
    <style:style style:name="co35" style:family="table-column">
      <style:table-column-properties fo:break-before="auto" style:column-width="3.17cm"/>
    </style:style>
    <style:style style:name="co36" style:family="table-column">
      <style:table-column-properties fo:break-before="auto" style:column-width="2.427cm"/>
    </style:style>
    <style:style style:name="co37" style:family="table-column">
      <style:table-column-properties fo:break-before="auto" style:column-width="2.406cm"/>
    </style:style>
    <style:style style:name="co38" style:family="table-column">
      <style:table-column-properties fo:break-before="auto" style:column-width="0.517cm"/>
    </style:style>
    <style:style style:name="ro1" style:family="table-row">
      <style:table-row-properties style:row-height="2.9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3" style:family="table-cell" style:parent-style-name="Default" style:data-style-name="N0">
      <style:table-cell-properties style:text-align-source="value-type" style:repeat-content="false" fo:background-color="transparent" style:vertical-align="bottom"/>
      <style:paragraph-properties fo:margin-left="0cm"/>
    </style:style>
    <style:style style:name="ce21" style:family="table-cell" style:parent-style-name="Default" style:data-style-name="N0">
      <style:table-cell-properties fo:background-color="transparent"/>
    </style:style>
    <style:style style:name="ce19" style:family="table-cell" style:parent-style-name="Default" style:data-style-name="N0"/>
    <style:style style:name="ce17" style:family="table-cell" style:parent-style-name="Default" style:data-style-name="N0">
      <style:table-cell-properties style:text-align-source="fix" style:repeat-content="false" fo:background-color="transparent" style:rotation-angle="90" style:vertical-align="bottom"/>
      <style:paragraph-properties fo:text-align="end" fo:margin-left="0cm"/>
    </style:style>
    <style:style style:name="ce23" style:family="table-cell" style:parent-style-name="Default">
      <style:table-cell-properties style:text-align-source="value-type" style:repeat-content="false" fo:background-color="transparent" style:vertical-align="bottom"/>
      <style:paragraph-properties fo:margin-left="0cm"/>
    </style:style>
    <style:style style:name="ce24" style:family="table-cell" style:parent-style-name="Default">
      <style:table-cell-properties style:text-align-source="value-type" style:repeat-content="false" fo:background-color="transparent" style:rotation-angle="0" style:vertical-align="bottom"/>
      <style:paragraph-properties fo:margin-left="0cm"/>
    </style:style>
    <style:style style:name="ce25" style:family="table-cell" style:parent-style-name="Default">
      <style:table-cell-properties style:text-align-source="value-type" style:repeat-content="false" fo:background-color="transparent" fo:wrap-option="wrap"/>
      <style:paragraph-properties fo:margin-left="0cm"/>
    </style:style>
    <style:style style:name="ce27" style:family="table-cell" style:parent-style-name="Default">
      <style:table-cell-properties style:text-align-source="value-type" style:repeat-content="false" fo:background-color="transparent"/>
      <style:paragraph-properties fo:margin-left="0cm"/>
    </style:style>
    <style:style style:name="ce9" style:family="table-cell" style:parent-style-name="Default">
      <style:table-cell-properties style:text-align-source="value-type" style:repeat-content="false"/>
      <style:paragraph-properties fo:margin-left="0cm"/>
    </style:style>
    <style:style style:name="ce28" style:family="table-cell" style:parent-style-name="Default" style:data-style-name="N99">
      <style:table-cell-properties fo:background-color="transparent"/>
    </style:style>
    <style:style style:name="ce20" style:family="table-cell" style:parent-style-name="Default">
      <style:table-cell-properties style:text-align-source="value-type" style:repeat-content="false" style:vertical-align="bottom"/>
      <style:paragraph-properties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2" table:default-cell-style-name="ce19"/>
        <table:table-column table:style-name="co1" table:default-cell-style-name="ce19"/>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column table:style-name="co6" table:default-cell-style-name="Default"/>
        <table:table-column table:style-name="co7" table:default-cell-style-name="Default"/>
        <table:table-column table:style-name="co6"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11"/>
        <table:table-column table:style-name="co6" table:default-cell-style-name="Default"/>
        <table:table-column table:style-name="co13" table:default-cell-style-name="Default"/>
        <table:table-column table:style-name="co14" table:default-cell-style-name="Default"/>
        <table:table-column table:style-name="co13" table:default-cell-style-name="ce9"/>
        <table:table-column table:style-name="co6" table:default-cell-style-name="Default"/>
        <table:table-column table:style-name="co10" table:default-cell-style-name="Default"/>
        <table:table-column table:style-name="co15" table:default-cell-style-name="Default"/>
        <table:table-column table:style-name="co16" table:number-columns-repeated="16357" table:default-cell-style-name="Default"/>
        <table:table-row table:style-name="ro1">
          <table:table-cell table:style-name="ce10" office:value-type="string" calcext:value-type="string">
            <text:p>テーブル順</text:p>
          </table:table-cell>
          <table:table-cell table:style-name="ce10" office:value-type="string" calcext:value-type="string">
            <text:p>デッキ順</text:p>
          </table:table-cell>
          <table:table-cell table:style-name="ce3" office:value-type="string" calcext:value-type="string">
            <text:p>ID</text:p>
          </table:table-cell>
          <table:table-cell table:style-name="ce17" office:value-type="string" calcext:value-type="string">
            <text:p>ローカルID</text:p>
          </table:table-cell>
          <table:table-cell table:style-name="ce23" office:value-type="string" calcext:value-type="string">
            <text:p>カード名</text:p>
          </table:table-cell>
          <table:table-cell table:style-name="ce23" office:value-type="string" calcext:value-type="string">
            <text:p>表示名</text:p>
          </table:table-cell>
          <table:table-cell table:style-name="ce23" office:value-type="string" calcext:value-type="string">
            <text:p>読み仮名</text:p>
          </table:table-cell>
          <table:table-cell table:style-name="ce23" office:value-type="string" calcext:value-type="string">
            <text:p>収録</text:p>
          </table:table-cell>
          <table:table-cell table:style-name="ce10" office:value-type="string" calcext:value-type="string">
            <text:p>収録番号</text:p>
          </table:table-cell>
          <table:table-cell table:style-name="ce10" office:value-type="string" calcext:value-type="string">
            <text:p>レアリティ</text:p>
          </table:table-cell>
          <table:table-cell table:style-name="ce10" office:value-type="string" calcext:value-type="string">
            <text:p>レアリティ番号</text:p>
          </table:table-cell>
          <table:table-cell table:style-name="ce23" office:value-type="string" calcext:value-type="string">
            <text:p>種類</text:p>
          </table:table-cell>
          <table:table-cell table:style-name="ce10" office:value-type="string" calcext:value-type="string">
            <text:p>種類番号</text:p>
          </table:table-cell>
          <table:table-cell table:style-name="ce23" office:value-type="string" calcext:value-type="string">
            <text:p>色</text:p>
          </table:table-cell>
          <table:table-cell table:style-name="ce10" office:value-type="string" calcext:value-type="string">
            <text:p>色番号</text:p>
          </table:table-cell>
          <table:table-cell table:style-name="ce10" office:value-type="string" calcext:value-type="string">
            <text:p>レベル</text:p>
          </table:table-cell>
          <table:table-cell table:style-name="ce10" office:value-type="string" calcext:value-type="string">
            <text:p>魔力コスト</text:p>
          </table:table-cell>
          <table:table-cell table:style-name="ce10" office:value-type="string" calcext:value-type="string">
            <text:p>能力語</text:p>
          </table:table-cell>
          <table:table-cell table:style-name="ce10" office:value-type="string" calcext:value-type="string">
            <text:p>能力語番号</text:p>
          </table:table-cell>
          <table:table-cell table:style-name="ce10" office:value-type="string" calcext:value-type="string">
            <text:p>特性</text:p>
          </table:table-cell>
          <table:table-cell table:style-name="ce10" office:value-type="string" calcext:value-type="string">
            <text:p>特性番号</text:p>
          </table:table-cell>
          <table:table-cell table:style-name="ce24" office:value-type="string" calcext:value-type="string">
            <text:p>ルールテキスト</text:p>
          </table:table-cell>
          <table:table-cell table:style-name="ce10" office:value-type="string" calcext:value-type="string">
            <text:p>パワー</text:p>
          </table:table-cell>
          <table:table-cell table:style-name="ce10" office:value-type="string" calcext:value-type="string">
            <text:p>遺業能力</text:p>
          </table:table-cell>
          <table:table-cell table:style-name="ce10" office:value-type="string" calcext:value-type="string">
            <text:p>遺業能力番号</text:p>
          </table:table-cell>
          <table:table-cell table:style-name="ce10" office:value-type="string" calcext:value-type="string">
            <text:p>デッキに何枚でも</text:p>
          </table:table-cell>
          <table:table-cell table:style-name="ce11" office:value-type="string" calcext:value-type="string">
            <text:p>画像URL</text:p>
          </table:table-cell>
          <table:table-cell table:style-name="ce23" office:value-type="string" calcext:value-type="string">
            <text:p>JSON</text:p>
          </table:table-cell>
          <table:table-cell table:style-name="ce20" table:number-columns-repeated="16347"/>
          <table:table-cell table:number-columns-repeated="9"/>
        </table:table-row>
        <table:table-row table:style-name="ro2">
          <table:table-cell table:style-name="ce11" office:value-type="float" office:value="1" calcext:value-type="float">
            <text:p>1</text:p>
          </table:table-cell>
          <table:table-cell table:style-name="ce11" office:value-type="float" office:value="228" calcext:value-type="float">
            <text:p>228</text:p>
          </table:table-cell>
          <table:table-cell table:style-name="ce21" office:value-type="string" calcext:value-type="string">
            <text:p>R-1</text:p>
          </table:table-cell>
          <table:table-cell table:style-name="ce21" office:value-type="float" office:value="1" calcext:value-type="float">
            <text:p>1</text:p>
          </table:table-cell>
          <table:table-cell table:style-name="ce11" office:value-type="string" calcext:value-type="string">
            <text:p>上杉謙信</text:p>
          </table:table-cell>
          <table:table-cell table:style-name="ce11" table:formula="of:=[.E2]" office:value-type="string" office:string-value="上杉謙信" calcext:value-type="string">
            <text:p>上杉謙信</text:p>
          </table:table-cell>
          <table:table-cell table:style-name="ce11" office:value-type="string" calcext:value-type="string">
            <text:p>うえすぎけんしん</text:p>
          </table:table-cell>
          <table:table-cell table:style-name="ce11" office:value-type="string" calcext:value-type="string">
            <text:p>伝説の武将デッキ</text:p>
          </table:table-cell>
          <table:table-cell table:style-name="ce11" table:formula="of:=VLOOKUP([.H2];[$収録番号.$A$1:$収録番号.$B$10];2;0)" office:value-type="float" office:value="10" calcext:value-type="float">
            <text:p>10</text:p>
          </table:table-cell>
          <table:table-cell table:style-name="ce11" office:value-type="string" calcext:value-type="string">
            <text:p>SR</text:p>
          </table:table-cell>
          <table:table-cell table:style-name="ce11" table:formula="of:=VLOOKUP([.J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種類番号.$A$1:$種類番号.$B$4];2;0)" office:value-type="float" office:value="1" calcext:value-type="float">
            <text:p>1</text:p>
          </table:table-cell>
          <table:table-cell table:style-name="ce11" office:value-type="string" calcext:value-type="string">
            <text:p>赤</text:p>
          </table:table-cell>
          <table:table-cell table:style-name="ce11" table:formula="of:=VLOOKUP([.N2];[$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能力語番号.$A$1:$能力語番号.$B$11];2;0);0)" office:value-type="float" office:value="0" calcext:value-type="float">
            <text:p>0</text:p>
          </table:table-cell>
          <table:table-cell office:value-type="string" calcext:value-type="string">
            <text:p>剣術</text:p>
          </table:table-cell>
          <table:table-cell table:style-name="ce11" table:formula="of:=IFERROR(VLOOKUP([.$T2];[$特性番号.$A$1:$特性番号.$B$8];2;0);0)" office:value-type="float" office:value="1" calcext:value-type="float">
            <text:p>1</text:p>
          </table:table-cell>
          <table:table-cell table:style-name="ce11" office:value-type="string" calcext:value-type="string">
            <text:p>アタッカーになったとき、これのパワー以下のパワーを持つ相手の戦場のイジン1体を破壊す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1.png</text:p>
          </table:table-cell>
          <table:table-cell table:style-name="ce11" table:formula="of:=CONCATENATE([$JSON.$A$1];[.$C2];[$JSON.$B$1];[.$E2];[$JSON.$C$1];[.F2];[$JSON.$D$1];[.$G2];[$JSON.$E$1];IF(ISNA([.$T2]);&quot;null&quot;;&quot;&quot;&quot;&quot;&amp;[.$T2]&amp;&quot;&quot;&quot;&quot;);[$JSON.$F$1];[.$V2];[$JSON.$G$1];IF(ISNA([.$X2]);&quot;null&quot;;&quot;&quot;&quot;&quot;&amp;[.$X2]&amp;&quot;&quot;&quot;&quot;);[$JSON.$H$1];[.$AA2];[$JSON.$I$1];[.$I2];[$JSON.$J$1];[.K2];[$JSON.$K$1];[.$M2];[$JSON.$L$1];[.$P2];[$JSON.$M$1];[.$O2];[$JSON.$N$1];[.$S2];[$JSON.$O$1];[.$U2];[$JSON.$P$1];IF(ISNA([.$W2]);&quot;null&quot;;[.$W2]);[$JSON.$Q$1];[.$Y2];[$JSON.$R$1];IF([.$Z2];&quot;true&quot;;&quot;false&quot;);[$JSON.$S$1];[.$A2];[$JSON.$T$1];[.$B2];[$JSON.$U$1])" office:value-type="string" office:string-value="{&quot;id&quot;:&quot;R-1&quot;,&quot;name&quot;:&quot;上杉謙信&quot;,&quot;displayName&quot;:&quot;上杉謙信&quot;,&quot;kana&quot;:&quot;うえすぎけんしん&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rarity&quot;:4,&quot;type&quot;:1,&quot;level&quot;:6,&quot;color&quot;:1,&quot;term&quot;:0,&quot;trait&quot;:1,&quot;power&quot;:6000,&quot;legacy&quot;:0,&quot;anyNumCopies&quot;:false,&quot;orderTable&quot;:1,&quot;orderDeck&quot;:228}," calcext:value-type="string">
            <text:p>{"id":"R-1","name":"上杉謙信","displayName":"上杉謙信","kana":"うえすぎけんしん","traitText":"剣術","ruleText":"アタッカーになったとき、これのパワー以下のパワーを持つ相手の戦場のイジン1体を破壊する。","legacyText":null,"imageUrl":"https://one-draw.jp/ijinden/cardlist/R01/card/R_001.png","expansion":10,"rarity":4,"type":1,"level":6,"color":1,"term":0,"trait":1,"power":6000,"legacy":0,"anyNumCopies":false,"orderTable":1,"orderDeck":228},</text:p>
          </table:table-cell>
          <table:table-cell table:number-columns-repeated="16356"/>
        </table:table-row>
        <table:table-row table:style-name="ro2">
          <table:table-cell table:style-name="ce11" office:value-type="float" office:value="2" calcext:value-type="float">
            <text:p>2</text:p>
          </table:table-cell>
          <table:table-cell table:style-name="ce11" office:value-type="float" office:value="1" calcext:value-type="float">
            <text:p>1</text:p>
          </table:table-cell>
          <table:table-cell table:style-name="ce21" office:value-type="string" calcext:value-type="string">
            <text:p>R-2</text:p>
          </table:table-cell>
          <table:table-cell table:style-name="ce21" office:value-type="float" office:value="2" calcext:value-type="float">
            <text:p>2</text:p>
          </table:table-cell>
          <table:table-cell table:style-name="ce11" office:value-type="string" calcext:value-type="string">
            <text:p>源義経</text:p>
          </table:table-cell>
          <table:table-cell table:style-name="ce11" table:formula="of:=[.E3]" office:value-type="string" office:string-value="源義経" calcext:value-type="string">
            <text:p>源義経</text:p>
          </table:table-cell>
          <table:table-cell table:style-name="ce11" office:value-type="string" calcext:value-type="string">
            <text:p>みなもとのよしつね</text:p>
          </table:table-cell>
          <table:table-cell table:style-name="ce11" office:value-type="string" calcext:value-type="string">
            <text:p>伝説の武将デッキ</text:p>
          </table:table-cell>
          <table:table-cell table:style-name="ce11" table:formula="of:=VLOOKUP([.H3];[$収録番号.$A$1:$収録番号.$B$10];2;0)" office:value-type="float" office:value="10" calcext:value-type="float">
            <text:p>10</text:p>
          </table:table-cell>
          <table:table-cell table:style-name="ce11" office:value-type="string" calcext:value-type="string">
            <text:p>N</text:p>
          </table:table-cell>
          <table:table-cell table:style-name="ce11" table:formula="of:=VLOOKUP([.J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種類番号.$A$1:$種類番号.$B$4];2;0)" office:value-type="float" office:value="1" calcext:value-type="float">
            <text:p>1</text:p>
          </table:table-cell>
          <table:table-cell table:style-name="ce11" office:value-type="string" calcext:value-type="string">
            <text:p>赤</text:p>
          </table:table-cell>
          <table:table-cell table:style-name="ce11" table:formula="of:=VLOOKUP([.N3];[$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能力語番号.$A$1:$能力語番号.$B$11];2;0);0)" office:value-type="float" office:value="0" calcext:value-type="float">
            <text:p>0</text:p>
          </table:table-cell>
          <table:table-cell office:value-type="string" calcext:value-type="string">
            <text:p>剣術</text:p>
          </table:table-cell>
          <table:table-cell table:style-name="ce11" table:formula="of:=IFERROR(VLOOKUP([.$T3];[$特性番号.$A$1:$特性番号.$B$8];2;0);0)" office:value-type="float" office:value="1" calcext:value-type="float">
            <text:p>1</text:p>
          </table:table-cell>
          <table:table-cell table:style-name="ce11" office:value-type="string" calcext:value-type="string">
            <text:p>即応</text:p>
          </table:table-cell>
          <table:table-cell table:style-name="ce11" office:value-type="float" office:value="500" calcext:value-type="float">
            <text:p>500</text:p>
          </table:table-cell>
          <table:table-cell table:style-name="ce25" office:value-type="string" calcext:value-type="string">
            <text:p>魔力化</text:p>
          </table:table-cell>
          <table:table-cell table:style-name="ce11" table:formula="of:=IFERROR(VLOOKUP([.$X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2.png</text:p>
          </table:table-cell>
          <table:table-cell table:style-name="ce11" table:formula="of:=CONCATENATE([$JSON.$A$1];[.$C3];[$JSON.$B$1];[.$E3];[$JSON.$C$1];[.F3];[$JSON.$D$1];[.$G3];[$JSON.$E$1];IF(ISNA([.$T3]);&quot;null&quot;;&quot;&quot;&quot;&quot;&amp;[.$T3]&amp;&quot;&quot;&quot;&quot;);[$JSON.$F$1];[.$V3];[$JSON.$G$1];IF(ISNA([.$X3]);&quot;null&quot;;&quot;&quot;&quot;&quot;&amp;[.$X3]&amp;&quot;&quot;&quot;&quot;);[$JSON.$H$1];[.$AA3];[$JSON.$I$1];[.$I3];[$JSON.$J$1];[.K3];[$JSON.$K$1];[.$M3];[$JSON.$L$1];[.$P3];[$JSON.$M$1];[.$O3];[$JSON.$N$1];[.$S3];[$JSON.$O$1];[.$U3];[$JSON.$P$1];IF(ISNA([.$W3]);&quot;null&quot;;[.$W3]);[$JSON.$Q$1];[.$Y3];[$JSON.$R$1];IF([.$Z3];&quot;true&quot;;&quot;false&quot;);[$JSON.$S$1];[.$A3];[$JSON.$T$1];[.$B3];[$JSON.$U$1])" office:value-type="string" office:string-value="{&quot;id&quot;:&quot;R-2&quot;,&quot;name&quot;:&quot;源義経&quot;,&quot;displayName&quot;:&quot;源義経&quot;,&quot;kana&quot;:&quot;みなもとのよしつね&quot;,&quot;traitText&quot;:&quot;剣術&quot;,&quot;ruleText&quot;:&quot;即応&quot;,&quot;legacyText&quot;:&quot;魔力化&quot;,&quot;imageUrl&quot;:&quot;https://one-draw.jp/ijinden/cardlist/R01/card/R_002.png&quot;,&quot;expansion&quot;:10,&quot;rarity&quot;:1,&quot;type&quot;:1,&quot;level&quot;:1,&quot;color&quot;:1,&quot;term&quot;:0,&quot;trait&quot;:1,&quot;power&quot;:500,&quot;legacy&quot;:1,&quot;anyNumCopies&quot;:false,&quot;orderTable&quot;:2,&quot;orderDeck&quot;:1}," calcext:value-type="string">
            <text:p>{"id":"R-2","name":"源義経","displayName":"源義経","kana":"みなもとのよしつね","traitText":"剣術","ruleText":"即応","legacyText":"魔力化","imageUrl":"https://one-draw.jp/ijinden/cardlist/R01/card/R_002.png","expansion":10,"rarity":1,"type":1,"level":1,"color":1,"term":0,"trait":1,"power":500,"legacy":1,"anyNumCopies":false,"orderTable":2,"orderDeck":1},</text:p>
          </table:table-cell>
          <table:table-cell table:number-columns-repeated="16356"/>
        </table:table-row>
        <table:table-row table:style-name="ro2">
          <table:table-cell table:style-name="ce11" office:value-type="float" office:value="3" calcext:value-type="float">
            <text:p>3</text:p>
          </table:table-cell>
          <table:table-cell table:style-name="ce11" office:value-type="float" office:value="31" calcext:value-type="float">
            <text:p>31</text:p>
          </table:table-cell>
          <table:table-cell table:style-name="ce21" office:value-type="string" calcext:value-type="string">
            <text:p>R-3</text:p>
          </table:table-cell>
          <table:table-cell table:style-name="ce21" office:value-type="float" office:value="3" calcext:value-type="float">
            <text:p>3</text:p>
          </table:table-cell>
          <table:table-cell table:style-name="ce11" office:value-type="string" calcext:value-type="string">
            <text:p>武田勝頼</text:p>
          </table:table-cell>
          <table:table-cell table:style-name="ce11" table:formula="of:=[.E4]" office:value-type="string" office:string-value="武田勝頼" calcext:value-type="string">
            <text:p>武田勝頼</text:p>
          </table:table-cell>
          <table:table-cell table:style-name="ce11" office:value-type="string" calcext:value-type="string">
            <text:p>たけだかつより</text:p>
          </table:table-cell>
          <table:table-cell table:style-name="ce11" office:value-type="string" calcext:value-type="string">
            <text:p>伝説の武将デッキ</text:p>
          </table:table-cell>
          <table:table-cell table:style-name="ce11" table:formula="of:=VLOOKUP([.H4];[$収録番号.$A$1:$収録番号.$B$10];2;0)" office:value-type="float" office:value="10" calcext:value-type="float">
            <text:p>10</text:p>
          </table:table-cell>
          <table:table-cell table:style-name="ce11" office:value-type="string" calcext:value-type="string">
            <text:p>N</text:p>
          </table:table-cell>
          <table:table-cell table:style-name="ce11" table:formula="of:=VLOOKUP([.J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種類番号.$A$1:$種類番号.$B$4];2;0)" office:value-type="float" office:value="1" calcext:value-type="float">
            <text:p>1</text:p>
          </table:table-cell>
          <table:table-cell table:style-name="ce11" office:value-type="string" calcext:value-type="string">
            <text:p>赤</text:p>
          </table:table-cell>
          <table:table-cell table:style-name="ce11" table:formula="of:=VLOOKUP([.N4];[$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能力語番号.$A$1:$能力語番号.$B$11];2;0);0)" office:value-type="float" office:value="0" calcext:value-type="float">
            <text:p>0</text:p>
          </table:table-cell>
          <table:table-cell office:value-type="string" calcext:value-type="string">
            <text:p>剣術</text:p>
          </table:table-cell>
          <table:table-cell table:style-name="ce11" table:formula="of:=IFERROR(VLOOKUP([.$T4];[$特性番号.$A$1:$特性番号.$B$8];2;0);0)" office:value-type="float" office:value="1" calcext:value-type="float">
            <text:p>1</text:p>
          </table:table-cell>
          <table:table-cell table:style-name="ce11" office:value-type="string" calcext:value-type="string">
            <text:p>アタ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3.png</text:p>
          </table:table-cell>
          <table:table-cell table:style-name="ce11" table:formula="of:=CONCATENATE([$JSON.$A$1];[.$C4];[$JSON.$B$1];[.$E4];[$JSON.$C$1];[.F4];[$JSON.$D$1];[.$G4];[$JSON.$E$1];IF(ISNA([.$T4]);&quot;null&quot;;&quot;&quot;&quot;&quot;&amp;[.$T4]&amp;&quot;&quot;&quot;&quot;);[$JSON.$F$1];[.$V4];[$JSON.$G$1];IF(ISNA([.$X4]);&quot;null&quot;;&quot;&quot;&quot;&quot;&amp;[.$X4]&amp;&quot;&quot;&quot;&quot;);[$JSON.$H$1];[.$AA4];[$JSON.$I$1];[.$I4];[$JSON.$J$1];[.K4];[$JSON.$K$1];[.$M4];[$JSON.$L$1];[.$P4];[$JSON.$M$1];[.$O4];[$JSON.$N$1];[.$S4];[$JSON.$O$1];[.$U4];[$JSON.$P$1];IF(ISNA([.$W4]);&quot;null&quot;;[.$W4]);[$JSON.$Q$1];[.$Y4];[$JSON.$R$1];IF([.$Z4];&quot;true&quot;;&quot;false&quot;);[$JSON.$S$1];[.$A4];[$JSON.$T$1];[.$B4];[$JSON.$U$1])" office:value-type="string" office:string-value="{&quot;id&quot;:&quot;R-3&quot;,&quot;name&quot;:&quot;武田勝頼&quot;,&quot;displayName&quot;:&quot;武田勝頼&quot;,&quot;kana&quot;:&quot;たけだかつより&quot;,&quot;traitText&quot;:&quot;剣術&quot;,&quot;ruleText&quot;:&quot;アタック+2000&quot;,&quot;legacyText&quot;:&quot;1ドローする&quot;,&quot;imageUrl&quot;:&quot;https://one-draw.jp/ijinden/cardlist/R01/card/R_003.png&quot;,&quot;expansion&quot;:10,&quot;rarity&quot;:1,&quot;type&quot;:1,&quot;level&quot;:2,&quot;color&quot;:1,&quot;term&quot;:0,&quot;trait&quot;:1,&quot;power&quot;:1000,&quot;legacy&quot;:4,&quot;anyNumCopies&quot;:false,&quot;orderTable&quot;:3,&quot;orderDeck&quot;:31}," calcext:value-type="string">
            <text:p>{"id":"R-3","name":"武田勝頼","displayName":"武田勝頼","kana":"たけだかつより","traitText":"剣術","ruleText":"アタック+2000","legacyText":"1ドローする","imageUrl":"https://one-draw.jp/ijinden/cardlist/R01/card/R_003.png","expansion":10,"rarity":1,"type":1,"level":2,"color":1,"term":0,"trait":1,"power":1000,"legacy":4,"anyNumCopies":false,"orderTable":3,"orderDeck":31},</text:p>
          </table:table-cell>
          <table:table-cell table:number-columns-repeated="16356"/>
        </table:table-row>
        <table:table-row table:style-name="ro2">
          <table:table-cell table:style-name="ce11" office:value-type="float" office:value="4" calcext:value-type="float">
            <text:p>4</text:p>
          </table:table-cell>
          <table:table-cell table:style-name="ce11" office:value-type="float" office:value="81" calcext:value-type="float">
            <text:p>81</text:p>
          </table:table-cell>
          <table:table-cell table:style-name="ce21" office:value-type="string" calcext:value-type="string">
            <text:p>R-4</text:p>
          </table:table-cell>
          <table:table-cell table:style-name="ce21" office:value-type="float" office:value="4" calcext:value-type="float">
            <text:p>4</text:p>
          </table:table-cell>
          <table:table-cell table:style-name="ce11" office:value-type="string" calcext:value-type="string">
            <text:p>ヴラド・ツェペシュ</text:p>
          </table:table-cell>
          <table:table-cell table:style-name="ce11" table:formula="of:=[.E5]" office:value-type="string" office:string-value="ヴラド・ツェペシュ" calcext:value-type="string">
            <text:p>ヴラド・ツェペシュ</text:p>
          </table:table-cell>
          <table:table-cell table:style-name="ce11" office:value-type="string" calcext:value-type="string">
            <text:p>ゔらどつぇぺしゅ</text:p>
          </table:table-cell>
          <table:table-cell table:style-name="ce11" office:value-type="string" calcext:value-type="string">
            <text:p>伝説の武将デッキ</text:p>
          </table:table-cell>
          <table:table-cell table:style-name="ce11" table:formula="of:=VLOOKUP([.H5];[$収録番号.$A$1:$収録番号.$B$10];2;0)" office:value-type="float" office:value="10" calcext:value-type="float">
            <text:p>10</text:p>
          </table:table-cell>
          <table:table-cell table:style-name="ce11" office:value-type="string" calcext:value-type="string">
            <text:p>N</text:p>
          </table:table-cell>
          <table:table-cell table:style-name="ce11" table:formula="of:=VLOOKUP([.J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種類番号.$A$1:$種類番号.$B$4];2;0)" office:value-type="float" office:value="1" calcext:value-type="float">
            <text:p>1</text:p>
          </table:table-cell>
          <table:table-cell table:style-name="ce11" office:value-type="string" calcext:value-type="string">
            <text:p>赤</text:p>
          </table:table-cell>
          <table:table-cell table:style-name="ce11" table:formula="of:=VLOOKUP([.N5];[$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5];[$特性番号.$A$1:$特性番号.$B$8];2;0);0)" office:value-type="float" office:value="0" calcext:value-type="float">
            <text:p>0</text:p>
          </table:table-cell>
          <table:table-cell table:style-name="ce11" office:value-type="string" calcext:value-type="string">
            <text:p>アタッカーになったとき、自分の魔力ゾーンのマリョク1つを裏にして発動できる。パワー2000以下の相手の戦場のイジン1体を破壊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4.png</text:p>
          </table:table-cell>
          <table:table-cell table:style-name="ce11" table:formula="of:=CONCATENATE([$JSON.$A$1];[.$C5];[$JSON.$B$1];[.$E5];[$JSON.$C$1];[.F5];[$JSON.$D$1];[.$G5];[$JSON.$E$1];IF(ISNA([.$T5]);&quot;null&quot;;&quot;&quot;&quot;&quot;&amp;[.$T5]&amp;&quot;&quot;&quot;&quot;);[$JSON.$F$1];[.$V5];[$JSON.$G$1];IF(ISNA([.$X5]);&quot;null&quot;;&quot;&quot;&quot;&quot;&amp;[.$X5]&amp;&quot;&quot;&quot;&quot;);[$JSON.$H$1];[.$AA5];[$JSON.$I$1];[.$I5];[$JSON.$J$1];[.K5];[$JSON.$K$1];[.$M5];[$JSON.$L$1];[.$P5];[$JSON.$M$1];[.$O5];[$JSON.$N$1];[.$S5];[$JSON.$O$1];[.$U5];[$JSON.$P$1];IF(ISNA([.$W5]);&quot;null&quot;;[.$W5]);[$JSON.$Q$1];[.$Y5];[$JSON.$R$1];IF([.$Z5];&quot;true&quot;;&quot;false&quot;);[$JSON.$S$1];[.$A5];[$JSON.$T$1];[.$B5];[$JSON.$U$1])" office:value-type="string" office:string-value="{&quot;id&quot;:&quot;R-4&quot;,&quot;name&quot;:&quot;ヴラド・ツェペシュ&quot;,&quot;displayName&quot;:&quot;ヴラド・ツェペシュ&quot;,&quot;kana&quot;:&quot;ゔらどつぇぺしゅ&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rarity&quot;:1,&quot;type&quot;:1,&quot;level&quot;:3,&quot;color&quot;:1,&quot;term&quot;:0,&quot;trait&quot;:0,&quot;power&quot;:3000,&quot;legacy&quot;:0,&quot;anyNumCopies&quot;:false,&quot;orderTable&quot;:4,&quot;orderDeck&quot;:81}," calcext:value-type="string">
            <text:p>{"id":"R-4","name":"ヴラド・ツェペシュ","displayName":"ヴラド・ツェペシュ","kana":"ゔらどつぇぺしゅ","traitText":null,"ruleText":"アタッカーになったとき、自分の魔力ゾーンのマリョク1つを裏にして発動できる。パワー2000以下の相手の戦場のイジン1体を破壊する。","legacyText":null,"imageUrl":"https://one-draw.jp/ijinden/cardlist/R01/card/R_004.png","expansion":10,"rarity":1,"type":1,"level":3,"color":1,"term":0,"trait":0,"power":3000,"legacy":0,"anyNumCopies":false,"orderTable":4,"orderDeck":81},</text:p>
          </table:table-cell>
          <table:table-cell table:number-columns-repeated="16356"/>
        </table:table-row>
        <table:table-row table:style-name="ro2">
          <table:table-cell table:style-name="ce11" office:value-type="float" office:value="5" calcext:value-type="float">
            <text:p>5</text:p>
          </table:table-cell>
          <table:table-cell table:style-name="ce11" office:value-type="float" office:value="135" calcext:value-type="float">
            <text:p>135</text:p>
          </table:table-cell>
          <table:table-cell table:style-name="ce21" office:value-type="string" calcext:value-type="string">
            <text:p>R-5</text:p>
          </table:table-cell>
          <table:table-cell table:style-name="ce21" office:value-type="float" office:value="5" calcext:value-type="float">
            <text:p>5</text:p>
          </table:table-cell>
          <table:table-cell table:style-name="ce11" office:value-type="string" calcext:value-type="string">
            <text:p>坂上田村麻呂</text:p>
          </table:table-cell>
          <table:table-cell table:style-name="ce11" office:value-type="string" calcext:value-type="string">
            <text:p>坂上田村麻呂 (スターター)</text:p>
          </table:table-cell>
          <table:table-cell table:style-name="ce11" office:value-type="string" calcext:value-type="string">
            <text:p>さかのうえのたむらまろ</text:p>
          </table:table-cell>
          <table:table-cell table:style-name="ce11" office:value-type="string" calcext:value-type="string">
            <text:p>伝説の武将デッキ</text:p>
          </table:table-cell>
          <table:table-cell table:style-name="ce11" table:formula="of:=VLOOKUP([.H6];[$収録番号.$A$1:$収録番号.$B$10];2;0)" office:value-type="float" office:value="10" calcext:value-type="float">
            <text:p>10</text:p>
          </table:table-cell>
          <table:table-cell table:style-name="ce11" office:value-type="string" calcext:value-type="string">
            <text:p>N</text:p>
          </table:table-cell>
          <table:table-cell table:style-name="ce11" table:formula="of:=VLOOKUP([.J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種類番号.$A$1:$種類番号.$B$4];2;0)" office:value-type="float" office:value="1" calcext:value-type="float">
            <text:p>1</text:p>
          </table:table-cell>
          <table:table-cell table:style-name="ce11" office:value-type="string" calcext:value-type="string">
            <text:p>赤</text:p>
          </table:table-cell>
          <table:table-cell table:style-name="ce11" table:formula="of:=VLOOKUP([.N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能力語番号.$A$1:$能力語番号.$B$11];2;0);0)" office:value-type="float" office:value="0" calcext:value-type="float">
            <text:p>0</text:p>
          </table:table-cell>
          <table:table-cell office:value-type="string" calcext:value-type="string">
            <text:p>剣術</text:p>
          </table:table-cell>
          <table:table-cell table:style-name="ce11" table:formula="of:=IFERROR(VLOOKUP([.$T6];[$特性番号.$A$1:$特性番号.$B$8];2;0);0)" office:value-type="float" office:value="1" calcext:value-type="float">
            <text:p>1</text:p>
          </table:table-cell>
          <table:table-cell table:style-name="ce11" office:value-type="string" calcext:value-type="string">
            <text:p>ダブルプレッシャー</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5.png</text:p>
          </table:table-cell>
          <table:table-cell table:style-name="ce11" table:formula="of:=CONCATENATE([$JSON.$A$1];[.$C6];[$JSON.$B$1];[.$E6];[$JSON.$C$1];[.F6];[$JSON.$D$1];[.$G6];[$JSON.$E$1];IF(ISNA([.$T6]);&quot;null&quot;;&quot;&quot;&quot;&quot;&amp;[.$T6]&amp;&quot;&quot;&quot;&quot;);[$JSON.$F$1];[.$V6];[$JSON.$G$1];IF(ISNA([.$X6]);&quot;null&quot;;&quot;&quot;&quot;&quot;&amp;[.$X6]&amp;&quot;&quot;&quot;&quot;);[$JSON.$H$1];[.$AA6];[$JSON.$I$1];[.$I6];[$JSON.$J$1];[.K6];[$JSON.$K$1];[.$M6];[$JSON.$L$1];[.$P6];[$JSON.$M$1];[.$O6];[$JSON.$N$1];[.$S6];[$JSON.$O$1];[.$U6];[$JSON.$P$1];IF(ISNA([.$W6]);&quot;null&quot;;[.$W6]);[$JSON.$Q$1];[.$Y6];[$JSON.$R$1];IF([.$Z6];&quot;true&quot;;&quot;false&quot;);[$JSON.$S$1];[.$A6];[$JSON.$T$1];[.$B6];[$JSON.$U$1])" office:value-type="string" office:string-value="{&quot;id&quot;:&quot;R-5&quot;,&quot;name&quot;:&quot;坂上田村麻呂&quot;,&quot;displayName&quot;:&quot;坂上田村麻呂 (スターター)&quot;,&quot;kana&quot;:&quot;さかのうえのたむらまろ&quot;,&quot;traitText&quot;:&quot;剣術&quot;,&quot;ruleText&quot;:&quot;ダブルプレッシャー&quot;,&quot;legacyText&quot;:null,&quot;imageUrl&quot;:&quot;https://one-draw.jp/ijinden/cardlist/R01/card/R_005.png&quot;,&quot;expansion&quot;:10,&quot;rarity&quot;:1,&quot;type&quot;:1,&quot;level&quot;:4,&quot;color&quot;:1,&quot;term&quot;:0,&quot;trait&quot;:1,&quot;power&quot;:1000,&quot;legacy&quot;:0,&quot;anyNumCopies&quot;:false,&quot;orderTable&quot;:5,&quot;orderDeck&quot;:135}," calcext:value-type="string">
            <text:p>{"id":"R-5","name":"坂上田村麻呂","displayName":"坂上田村麻呂 (スターター)","kana":"さかのうえのたむらまろ","traitText":"剣術","ruleText":"ダブルプレッシャー","legacyText":null,"imageUrl":"https://one-draw.jp/ijinden/cardlist/R01/card/R_005.png","expansion":10,"rarity":1,"type":1,"level":4,"color":1,"term":0,"trait":1,"power":1000,"legacy":0,"anyNumCopies":false,"orderTable":5,"orderDeck":135},</text:p>
          </table:table-cell>
          <table:table-cell table:number-columns-repeated="16356"/>
        </table:table-row>
        <table:table-row table:style-name="ro2">
          <table:table-cell table:style-name="ce11" office:value-type="float" office:value="6" calcext:value-type="float">
            <text:p>6</text:p>
          </table:table-cell>
          <table:table-cell table:style-name="ce11" office:value-type="float" office:value="181" calcext:value-type="float">
            <text:p>181</text:p>
          </table:table-cell>
          <table:table-cell table:style-name="ce21" office:value-type="string" calcext:value-type="string">
            <text:p>R-6</text:p>
          </table:table-cell>
          <table:table-cell table:style-name="ce21" office:value-type="float" office:value="6" calcext:value-type="float">
            <text:p>6</text:p>
          </table:table-cell>
          <table:table-cell table:style-name="ce11" office:value-type="string" calcext:value-type="string">
            <text:p>楠木正成</text:p>
          </table:table-cell>
          <table:table-cell table:style-name="ce11" table:formula="of:=[.E7]" office:value-type="string" office:string-value="楠木正成" calcext:value-type="string">
            <text:p>楠木正成</text:p>
          </table:table-cell>
          <table:table-cell table:style-name="ce11" office:value-type="string" calcext:value-type="string">
            <text:p>くすのきまさしげ</text:p>
          </table:table-cell>
          <table:table-cell table:style-name="ce11" office:value-type="string" calcext:value-type="string">
            <text:p>伝説の武将デッキ</text:p>
          </table:table-cell>
          <table:table-cell table:style-name="ce11" table:formula="of:=VLOOKUP([.H7];[$収録番号.$A$1:$収録番号.$B$10];2;0)" office:value-type="float" office:value="10" calcext:value-type="float">
            <text:p>10</text:p>
          </table:table-cell>
          <table:table-cell table:style-name="ce11" office:value-type="string" calcext:value-type="string">
            <text:p>N</text:p>
          </table:table-cell>
          <table:table-cell table:style-name="ce11" table:formula="of:=VLOOKUP([.J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種類番号.$A$1:$種類番号.$B$4];2;0)" office:value-type="float" office:value="1" calcext:value-type="float">
            <text:p>1</text:p>
          </table:table-cell>
          <table:table-cell table:style-name="ce11" office:value-type="string" calcext:value-type="string">
            <text:p>赤</text:p>
          </table:table-cell>
          <table:table-cell table:style-name="ce11" table:formula="of:=VLOOKUP([.N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能力語番号.$A$1:$能力語番号.$B$11];2;0);0)" office:value-type="float" office:value="0" calcext:value-type="float">
            <text:p>0</text:p>
          </table:table-cell>
          <table:table-cell office:value-type="string" calcext:value-type="string">
            <text:p>剣術</text:p>
          </table:table-cell>
          <table:table-cell table:style-name="ce11" table:formula="of:=IFERROR(VLOOKUP([.$T7];[$特性番号.$A$1:$特性番号.$B$8];2;0);0)" office:value-type="float" office:value="1" calcext:value-type="float">
            <text:p>1</text:p>
          </table:table-cell>
          <table:table-cell table:style-name="ce11" office:value-type="string" calcext:value-type="string">
            <text:p>戦場に置かれたとき、イジン召喚権+1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6.png</text:p>
          </table:table-cell>
          <table:table-cell table:style-name="ce11" table:formula="of:=CONCATENATE([$JSON.$A$1];[.$C7];[$JSON.$B$1];[.$E7];[$JSON.$C$1];[.F7];[$JSON.$D$1];[.$G7];[$JSON.$E$1];IF(ISNA([.$T7]);&quot;null&quot;;&quot;&quot;&quot;&quot;&amp;[.$T7]&amp;&quot;&quot;&quot;&quot;);[$JSON.$F$1];[.$V7];[$JSON.$G$1];IF(ISNA([.$X7]);&quot;null&quot;;&quot;&quot;&quot;&quot;&amp;[.$X7]&amp;&quot;&quot;&quot;&quot;);[$JSON.$H$1];[.$AA7];[$JSON.$I$1];[.$I7];[$JSON.$J$1];[.K7];[$JSON.$K$1];[.$M7];[$JSON.$L$1];[.$P7];[$JSON.$M$1];[.$O7];[$JSON.$N$1];[.$S7];[$JSON.$O$1];[.$U7];[$JSON.$P$1];IF(ISNA([.$W7]);&quot;null&quot;;[.$W7]);[$JSON.$Q$1];[.$Y7];[$JSON.$R$1];IF([.$Z7];&quot;true&quot;;&quot;false&quot;);[$JSON.$S$1];[.$A7];[$JSON.$T$1];[.$B7];[$JSON.$U$1])" office:value-type="string" office:string-value="{&quot;id&quot;:&quot;R-6&quot;,&quot;name&quot;:&quot;楠木正成&quot;,&quot;displayName&quot;:&quot;楠木正成&quot;,&quot;kana&quot;:&quot;くすのきまさしげ&quot;,&quot;traitText&quot;:&quot;剣術&quot;,&quot;ruleText&quot;:&quot;戦場に置かれたとき、イジン召喚権+1する。&quot;,&quot;legacyText&quot;:null,&quot;imageUrl&quot;:&quot;https://one-draw.jp/ijinden/cardlist/R01/card/R_006.png&quot;,&quot;expansion&quot;:10,&quot;rarity&quot;:1,&quot;type&quot;:1,&quot;level&quot;:5,&quot;color&quot;:1,&quot;term&quot;:0,&quot;trait&quot;:1,&quot;power&quot;:5000,&quot;legacy&quot;:0,&quot;anyNumCopies&quot;:false,&quot;orderTable&quot;:6,&quot;orderDeck&quot;:181}," calcext:value-type="string">
            <text:p>{"id":"R-6","name":"楠木正成","displayName":"楠木正成","kana":"くすのきまさしげ","traitText":"剣術","ruleText":"戦場に置かれたとき、イジン召喚権+1する。","legacyText":null,"imageUrl":"https://one-draw.jp/ijinden/cardlist/R01/card/R_006.png","expansion":10,"rarity":1,"type":1,"level":5,"color":1,"term":0,"trait":1,"power":5000,"legacy":0,"anyNumCopies":false,"orderTable":6,"orderDeck":181},</text:p>
          </table:table-cell>
          <table:table-cell table:number-columns-repeated="16356"/>
        </table:table-row>
        <table:table-row table:style-name="ro2">
          <table:table-cell table:style-name="ce11" office:value-type="float" office:value="7" calcext:value-type="float">
            <text:p>7</text:p>
          </table:table-cell>
          <table:table-cell table:style-name="ce11" office:value-type="float" office:value="182" calcext:value-type="float">
            <text:p>182</text:p>
          </table:table-cell>
          <table:table-cell table:style-name="ce21" office:value-type="string" calcext:value-type="string">
            <text:p>R-7</text:p>
          </table:table-cell>
          <table:table-cell table:style-name="ce21" office:value-type="float" office:value="7" calcext:value-type="float">
            <text:p>7</text:p>
          </table:table-cell>
          <table:table-cell table:style-name="ce11" office:value-type="string" calcext:value-type="string">
            <text:p>ジェームズ・バトラー・ヒコック</text:p>
          </table:table-cell>
          <table:table-cell table:style-name="ce11" table:formula="of:=[.E8]" office:value-type="string" office:string-value="ジェームズ・バトラー・ヒコック" calcext:value-type="string">
            <text:p>ジェームズ・バトラー・ヒコック</text:p>
          </table:table-cell>
          <table:table-cell table:style-name="ce11" office:value-type="string" calcext:value-type="string">
            <text:p>じぇーむずばとらーひこっく</text:p>
          </table:table-cell>
          <table:table-cell table:style-name="ce11" office:value-type="string" calcext:value-type="string">
            <text:p>伝説の武将デッキ</text:p>
          </table:table-cell>
          <table:table-cell table:style-name="ce11" table:formula="of:=VLOOKUP([.H8];[$収録番号.$A$1:$収録番号.$B$10];2;0)" office:value-type="float" office:value="10" calcext:value-type="float">
            <text:p>10</text:p>
          </table:table-cell>
          <table:table-cell table:style-name="ce11" office:value-type="string" calcext:value-type="string">
            <text:p>N</text:p>
          </table:table-cell>
          <table:table-cell table:style-name="ce11" table:formula="of:=VLOOKUP([.J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種類番号.$A$1:$種類番号.$B$4];2;0)" office:value-type="float" office:value="1" calcext:value-type="float">
            <text:p>1</text:p>
          </table:table-cell>
          <table:table-cell table:style-name="ce11" office:value-type="string" calcext:value-type="string">
            <text:p>赤</text:p>
          </table:table-cell>
          <table:table-cell table:style-name="ce11" table:formula="of:=VLOOKUP([.N8];[$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8];[$特性番号.$A$1:$特性番号.$B$8];2;0);0)" office:value-type="float" office:value="0" calcext:value-type="float">
            <text:p>0</text:p>
          </table:table-cell>
          <table:table-cell table:style-name="ce11" office:value-type="string" calcext:value-type="string">
            <text:p>即応¶アタッカーになったとき、相手の戦場のハイケイ1つにつき1ドローす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7.png</text:p>
          </table:table-cell>
          <table:table-cell table:style-name="ce11" table:formula="of:=CONCATENATE([$JSON.$A$1];[.$C8];[$JSON.$B$1];[.$E8];[$JSON.$C$1];[.F8];[$JSON.$D$1];[.$G8];[$JSON.$E$1];IF(ISNA([.$T8]);&quot;null&quot;;&quot;&quot;&quot;&quot;&amp;[.$T8]&amp;&quot;&quot;&quot;&quot;);[$JSON.$F$1];[.$V8];[$JSON.$G$1];IF(ISNA([.$X8]);&quot;null&quot;;&quot;&quot;&quot;&quot;&amp;[.$X8]&amp;&quot;&quot;&quot;&quot;);[$JSON.$H$1];[.$AA8];[$JSON.$I$1];[.$I8];[$JSON.$J$1];[.K8];[$JSON.$K$1];[.$M8];[$JSON.$L$1];[.$P8];[$JSON.$M$1];[.$O8];[$JSON.$N$1];[.$S8];[$JSON.$O$1];[.$U8];[$JSON.$P$1];IF(ISNA([.$W8]);&quot;null&quot;;[.$W8]);[$JSON.$Q$1];[.$Y8];[$JSON.$R$1];IF([.$Z8];&quot;true&quot;;&quot;false&quot;);[$JSON.$S$1];[.$A8];[$JSON.$T$1];[.$B8];[$JSON.$U$1])" office:value-type="string" office:string-value="{&quot;id&quot;:&quot;R-7&quot;,&quot;name&quot;:&quot;ジェームズ・バトラー・ヒコック&quot;,&quot;displayName&quot;:&quot;ジェームズ・バトラー・ヒコック&quot;,&quot;kana&quot;:&quot;じぇーむずばとらーひこっく&quot;,&quot;traitText&quot;:null,&quot;ruleText&quot;:&quot;即応¶アタッカーになったとき、相手の戦場のハイケイ1つにつき1ドローする。&quot;,&quot;legacyText&quot;:null,&quot;imageUrl&quot;:&quot;https://one-draw.jp/ijinden/cardlist/R01/card/R_007.png&quot;,&quot;expansion&quot;:10,&quot;rarity&quot;:1,&quot;type&quot;:1,&quot;level&quot;:5,&quot;color&quot;:1,&quot;term&quot;:0,&quot;trait&quot;:0,&quot;power&quot;:4000,&quot;legacy&quot;:0,&quot;anyNumCopies&quot;:false,&quot;orderTable&quot;:7,&quot;orderDeck&quot;:182}," calcext:value-type="string">
            <text:p>{"id":"R-7","name":"ジェームズ・バトラー・ヒコック","displayName":"ジェームズ・バトラー・ヒコック","kana":"じぇーむずばとらーひこっく","traitText":null,"ruleText":"即応¶アタッカーになったとき、相手の戦場のハイケイ1つにつき1ドローする。","legacyText":null,"imageUrl":"https://one-draw.jp/ijinden/cardlist/R01/card/R_007.png","expansion":10,"rarity":1,"type":1,"level":5,"color":1,"term":0,"trait":0,"power":4000,"legacy":0,"anyNumCopies":false,"orderTable":7,"orderDeck":182},</text:p>
          </table:table-cell>
          <table:table-cell table:number-columns-repeated="16356"/>
        </table:table-row>
        <table:table-row table:style-name="ro2">
          <table:table-cell table:style-name="ce11" office:value-type="float" office:value="8" calcext:value-type="float">
            <text:p>8</text:p>
          </table:table-cell>
          <table:table-cell table:style-name="ce11" office:value-type="float" office:value="229" calcext:value-type="float">
            <text:p>229</text:p>
          </table:table-cell>
          <table:table-cell table:style-name="ce21" office:value-type="string" calcext:value-type="string">
            <text:p>R-8</text:p>
          </table:table-cell>
          <table:table-cell table:style-name="ce21" office:value-type="float" office:value="8" calcext:value-type="float">
            <text:p>8</text:p>
          </table:table-cell>
          <table:table-cell table:style-name="ce11" office:value-type="string" calcext:value-type="string">
            <text:p>アレクサンドロス大王</text:p>
          </table:table-cell>
          <table:table-cell table:style-name="ce11" office:value-type="string" calcext:value-type="string">
            <text:p>アレクサンドロス大王 (スターター)</text:p>
          </table:table-cell>
          <table:table-cell table:style-name="ce11" office:value-type="string" calcext:value-type="string">
            <text:p>あれくさんどろすだいおう</text:p>
          </table:table-cell>
          <table:table-cell table:style-name="ce11" office:value-type="string" calcext:value-type="string">
            <text:p>伝説の武将デッキ</text:p>
          </table:table-cell>
          <table:table-cell table:style-name="ce11" table:formula="of:=VLOOKUP([.H9];[$収録番号.$A$1:$収録番号.$B$10];2;0)" office:value-type="float" office:value="10" calcext:value-type="float">
            <text:p>10</text:p>
          </table:table-cell>
          <table:table-cell table:style-name="ce11" office:value-type="string" calcext:value-type="string">
            <text:p>N</text:p>
          </table:table-cell>
          <table:table-cell table:style-name="ce11" table:formula="of:=VLOOKUP([.J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9];[$種類番号.$A$1:$種類番号.$B$4];2;0)" office:value-type="float" office:value="1" calcext:value-type="float">
            <text:p>1</text:p>
          </table:table-cell>
          <table:table-cell table:style-name="ce11" office:value-type="string" calcext:value-type="string">
            <text:p>赤</text:p>
          </table:table-cell>
          <table:table-cell table:style-name="ce11" table:formula="of:=VLOOKUP([.N9];[$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9];[$特性番号.$A$1:$特性番号.$B$8];2;0);0)" office:value-type="float" office:value="0" calcext:value-type="float">
            <text:p>0</text:p>
          </table:table-cell>
          <table:table-cell table:style-name="ce11" office:value-type="string" calcext:value-type="string">
            <text:p>即応¶アタッカーになったとき、アタッカー1体につき相手の戦場のハイケイ1つを破壊す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8.png</text:p>
          </table:table-cell>
          <table:table-cell table:style-name="ce11" table:formula="of:=CONCATENATE([$JSON.$A$1];[.$C9];[$JSON.$B$1];[.$E9];[$JSON.$C$1];[.F9];[$JSON.$D$1];[.$G9];[$JSON.$E$1];IF(ISNA([.$T9]);&quot;null&quot;;&quot;&quot;&quot;&quot;&amp;[.$T9]&amp;&quot;&quot;&quot;&quot;);[$JSON.$F$1];[.$V9];[$JSON.$G$1];IF(ISNA([.$X9]);&quot;null&quot;;&quot;&quot;&quot;&quot;&amp;[.$X9]&amp;&quot;&quot;&quot;&quot;);[$JSON.$H$1];[.$AA9];[$JSON.$I$1];[.$I9];[$JSON.$J$1];[.K9];[$JSON.$K$1];[.$M9];[$JSON.$L$1];[.$P9];[$JSON.$M$1];[.$O9];[$JSON.$N$1];[.$S9];[$JSON.$O$1];[.$U9];[$JSON.$P$1];IF(ISNA([.$W9]);&quot;null&quot;;[.$W9]);[$JSON.$Q$1];[.$Y9];[$JSON.$R$1];IF([.$Z9];&quot;true&quot;;&quot;false&quot;);[$JSON.$S$1];[.$A9];[$JSON.$T$1];[.$B9];[$JSON.$U$1])" office:value-type="string" office:string-value="{&quot;id&quot;:&quot;R-8&quot;,&quot;name&quot;:&quot;アレクサンドロス大王&quot;,&quot;displayName&quot;:&quot;アレクサンドロス大王 (スターター)&quot;,&quot;kana&quot;:&quot;あれくさんどろすだいおう&quot;,&quot;traitText&quot;:null,&quot;ruleText&quot;:&quot;即応¶アタッカーになったとき、アタッカー1体につき相手の戦場のハイケイ1つを破壊する。&quot;,&quot;legacyText&quot;:null,&quot;imageUrl&quot;:&quot;https://one-draw.jp/ijinden/cardlist/R01/card/R_008.png&quot;,&quot;expansion&quot;:10,&quot;rarity&quot;:1,&quot;type&quot;:1,&quot;level&quot;:6,&quot;color&quot;:1,&quot;term&quot;:0,&quot;trait&quot;:0,&quot;power&quot;:6000,&quot;legacy&quot;:0,&quot;anyNumCopies&quot;:false,&quot;orderTable&quot;:8,&quot;orderDeck&quot;:229}," calcext:value-type="string">
            <text:p>{"id":"R-8","name":"アレクサンドロス大王","displayName":"アレクサンドロス大王 (スターター)","kana":"あれくさんどろすだいおう","traitText":null,"ruleText":"即応¶アタッカーになったとき、アタッカー1体につき相手の戦場のハイケイ1つを破壊する。","legacyText":null,"imageUrl":"https://one-draw.jp/ijinden/cardlist/R01/card/R_008.png","expansion":10,"rarity":1,"type":1,"level":6,"color":1,"term":0,"trait":0,"power":6000,"legacy":0,"anyNumCopies":false,"orderTable":8,"orderDeck":229},</text:p>
          </table:table-cell>
          <table:table-cell table:number-columns-repeated="16356"/>
        </table:table-row>
        <table:table-row table:style-name="ro2">
          <table:table-cell table:style-name="ce11" office:value-type="float" office:value="9" calcext:value-type="float">
            <text:p>9</text:p>
          </table:table-cell>
          <table:table-cell table:style-name="ce11" office:value-type="float" office:value="303" calcext:value-type="float">
            <text:p>303</text:p>
          </table:table-cell>
          <table:table-cell table:style-name="ce21" office:value-type="string" calcext:value-type="string">
            <text:p>R-9</text:p>
          </table:table-cell>
          <table:table-cell table:style-name="ce21" office:value-type="float" office:value="9" calcext:value-type="float">
            <text:p>9</text:p>
          </table:table-cell>
          <table:table-cell table:style-name="ce11" office:value-type="string" calcext:value-type="string">
            <text:p>神剣眠る氏社</text:p>
          </table:table-cell>
          <table:table-cell table:style-name="ce11" office:value-type="string" calcext:value-type="string">
            <text:p>神剣眠る氏社 (スターター)</text:p>
          </table:table-cell>
          <table:table-cell table:style-name="ce11" office:value-type="string" calcext:value-type="string">
            <text:p>しんけんねむるうじしゃ</text:p>
          </table:table-cell>
          <table:table-cell table:style-name="ce11" office:value-type="string" calcext:value-type="string">
            <text:p>伝説の武将デッキ</text:p>
          </table:table-cell>
          <table:table-cell table:style-name="ce11" table:formula="of:=VLOOKUP([.H10];[$収録番号.$A$1:$収録番号.$B$10];2;0)" office:value-type="float" office:value="10" calcext:value-type="float">
            <text:p>10</text:p>
          </table:table-cell>
          <table:table-cell table:style-name="ce11" office:value-type="string" calcext:value-type="string">
            <text:p>N</text:p>
          </table:table-cell>
          <table:table-cell table:style-name="ce11" table:formula="of:=VLOOKUP([.J1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0];[$種類番号.$A$1:$種類番号.$B$4];2;0)" office:value-type="float" office:value="2" calcext:value-type="float">
            <text:p>2</text:p>
          </table:table-cell>
          <table:table-cell table:style-name="ce11" office:value-type="string" calcext:value-type="string">
            <text:p>赤</text:p>
          </table:table-cell>
          <table:table-cell table:style-name="ce11" table:formula="of:=VLOOKUP([.N10];[$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0];[$特性番号.$A$1:$特性番号.$B$8];2;0);0)" office:value-type="float" office:value="0" calcext:value-type="float">
            <text:p>0</text:p>
          </table:table-cell>
          <table:table-cell table:style-name="ce11" office:value-type="string" calcext:value-type="string">
            <text:p>自分の戦場の赤のイジンが破壊されるたびに発動できる。そのイジン1体を裏にして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09.png</text:p>
          </table:table-cell>
          <table:table-cell table:style-name="ce11" table:formula="of:=CONCATENATE([$JSON.$A$1];[.$C10];[$JSON.$B$1];[.$E10];[$JSON.$C$1];[.F10];[$JSON.$D$1];[.$G10];[$JSON.$E$1];IF(ISNA([.$T10]);&quot;null&quot;;&quot;&quot;&quot;&quot;&amp;[.$T10]&amp;&quot;&quot;&quot;&quot;);[$JSON.$F$1];[.$V10];[$JSON.$G$1];IF(ISNA([.$X10]);&quot;null&quot;;&quot;&quot;&quot;&quot;&amp;[.$X10]&amp;&quot;&quot;&quot;&quot;);[$JSON.$H$1];[.$AA10];[$JSON.$I$1];[.$I10];[$JSON.$J$1];[.K10];[$JSON.$K$1];[.$M10];[$JSON.$L$1];[.$P10];[$JSON.$M$1];[.$O10];[$JSON.$N$1];[.$S10];[$JSON.$O$1];[.$U10];[$JSON.$P$1];IF(ISNA([.$W10]);&quot;null&quot;;[.$W10]);[$JSON.$Q$1];[.$Y10];[$JSON.$R$1];IF([.$Z10];&quot;true&quot;;&quot;false&quot;);[$JSON.$S$1];[.$A10];[$JSON.$T$1];[.$B10];[$JSON.$U$1])" office:value-type="string" office:string-value="{&quot;id&quot;:&quot;R-9&quot;,&quot;name&quot;:&quot;神剣眠る氏社&quot;,&quot;displayName&quot;:&quot;神剣眠る氏社 (スターター)&quot;,&quot;kana&quot;:&quot;しんけんねむるうじしゃ&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rarity&quot;:1,&quot;type&quot;:2,&quot;level&quot;:2,&quot;color&quot;:1,&quot;term&quot;:0,&quot;trait&quot;:0,&quot;power&quot;:null,&quot;legacy&quot;:1,&quot;anyNumCopies&quot;:false,&quot;orderTable&quot;:9,&quot;orderDeck&quot;:303}," calcext:value-type="string">
            <text:p>{"id":"R-9","name":"神剣眠る氏社","displayName":"神剣眠る氏社 (スターター)","kana":"しんけんねむるうじしゃ","traitText":null,"ruleText":"自分の戦場の赤のイジンが破壊されるたびに発動できる。そのイジン1体を裏にして魔力ゾーンに置く。","legacyText":"魔力化","imageUrl":"https://one-draw.jp/ijinden/cardlist/R01/card/R_009.png","expansion":10,"rarity":1,"type":2,"level":2,"color":1,"term":0,"trait":0,"power":null,"legacy":1,"anyNumCopies":false,"orderTable":9,"orderDeck":303},</text:p>
          </table:table-cell>
          <table:table-cell table:number-columns-repeated="16356"/>
        </table:table-row>
        <table:table-row table:style-name="ro2">
          <table:table-cell table:style-name="ce11" office:value-type="float" office:value="10" calcext:value-type="float">
            <text:p>10</text:p>
          </table:table-cell>
          <table:table-cell table:style-name="ce11" office:value-type="float" office:value="316" calcext:value-type="float">
            <text:p>316</text:p>
          </table:table-cell>
          <table:table-cell table:style-name="ce21" office:value-type="string" calcext:value-type="string">
            <text:p>R-10</text:p>
          </table:table-cell>
          <table:table-cell table:style-name="ce21" office:value-type="float" office:value="10" calcext:value-type="float">
            <text:p>10</text:p>
          </table:table-cell>
          <table:table-cell table:style-name="ce11" office:value-type="string" calcext:value-type="string">
            <text:p>連なる天守閣</text:p>
          </table:table-cell>
          <table:table-cell table:style-name="ce11" table:formula="of:=[.E11]" office:value-type="string" office:string-value="連なる天守閣" calcext:value-type="string">
            <text:p>連なる天守閣</text:p>
          </table:table-cell>
          <table:table-cell table:style-name="ce11" office:value-type="string" calcext:value-type="string">
            <text:p>つらなるてんしゅかく</text:p>
          </table:table-cell>
          <table:table-cell table:style-name="ce11" office:value-type="string" calcext:value-type="string">
            <text:p>伝説の武将デッキ</text:p>
          </table:table-cell>
          <table:table-cell table:style-name="ce11" table:formula="of:=VLOOKUP([.H11];[$収録番号.$A$1:$収録番号.$B$10];2;0)" office:value-type="float" office:value="10" calcext:value-type="float">
            <text:p>10</text:p>
          </table:table-cell>
          <table:table-cell table:style-name="ce11" office:value-type="string" calcext:value-type="string">
            <text:p>N</text:p>
          </table:table-cell>
          <table:table-cell table:style-name="ce11" table:formula="of:=VLOOKUP([.J1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1];[$種類番号.$A$1:$種類番号.$B$4];2;0)" office:value-type="float" office:value="2" calcext:value-type="float">
            <text:p>2</text:p>
          </table:table-cell>
          <table:table-cell table:style-name="ce11" office:value-type="string" calcext:value-type="string">
            <text:p>赤</text:p>
          </table:table-cell>
          <table:table-cell table:style-name="ce11" table:formula="of:=VLOOKUP([.N1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1];[$特性番号.$A$1:$特性番号.$B$8];2;0);0)" office:value-type="float" office:value="0" calcext:value-type="float">
            <text:p>0</text:p>
          </table:table-cell>
          <table:table-cell table:style-name="ce11"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10.png</text:p>
          </table:table-cell>
          <table:table-cell table:style-name="ce11" table:formula="of:=CONCATENATE([$JSON.$A$1];[.$C11];[$JSON.$B$1];[.$E11];[$JSON.$C$1];[.F11];[$JSON.$D$1];[.$G11];[$JSON.$E$1];IF(ISNA([.$T11]);&quot;null&quot;;&quot;&quot;&quot;&quot;&amp;[.$T11]&amp;&quot;&quot;&quot;&quot;);[$JSON.$F$1];[.$V11];[$JSON.$G$1];IF(ISNA([.$X11]);&quot;null&quot;;&quot;&quot;&quot;&quot;&amp;[.$X11]&amp;&quot;&quot;&quot;&quot;);[$JSON.$H$1];[.$AA11];[$JSON.$I$1];[.$I11];[$JSON.$J$1];[.K11];[$JSON.$K$1];[.$M11];[$JSON.$L$1];[.$P11];[$JSON.$M$1];[.$O11];[$JSON.$N$1];[.$S11];[$JSON.$O$1];[.$U11];[$JSON.$P$1];IF(ISNA([.$W11]);&quot;null&quot;;[.$W11]);[$JSON.$Q$1];[.$Y11];[$JSON.$R$1];IF([.$Z11];&quot;true&quot;;&quot;false&quot;);[$JSON.$S$1];[.$A11];[$JSON.$T$1];[.$B11];[$JSON.$U$1])" office:value-type="string" office:string-value="{&quot;id&quot;:&quot;R-10&quot;,&quot;name&quot;:&quot;連なる天守閣&quot;,&quot;displayName&quot;:&quot;連なる天守閣&quot;,&quot;kana&quot;:&quot;つらなるてんしゅかく&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rarity&quot;:1,&quot;type&quot;:2,&quot;level&quot;:3,&quot;color&quot;:1,&quot;term&quot;:0,&quot;trait&quot;:0,&quot;power&quot;:null,&quot;legacy&quot;:1,&quot;anyNumCopies&quot;:false,&quot;orderTable&quot;:10,&quot;orderDeck&quot;:316}," calcext:value-type="string">
            <text:p>{"id":"R-10","name":"連なる天守閣","displayName":"連なる天守閣","kana":"つらなるてんしゅかく","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rarity":1,"type":2,"level":3,"color":1,"term":0,"trait":0,"power":null,"legacy":1,"anyNumCopies":false,"orderTable":10,"orderDeck":316},</text:p>
          </table:table-cell>
          <table:table-cell table:number-columns-repeated="16356"/>
        </table:table-row>
        <table:table-row table:style-name="ro2">
          <table:table-cell table:style-name="ce11" office:value-type="float" office:value="11" calcext:value-type="float">
            <text:p>11</text:p>
          </table:table-cell>
          <table:table-cell table:style-name="ce11" office:value-type="float" office:value="384" calcext:value-type="float">
            <text:p>384</text:p>
          </table:table-cell>
          <table:table-cell table:style-name="ce21" office:value-type="string" calcext:value-type="string">
            <text:p>R-11</text:p>
          </table:table-cell>
          <table:table-cell table:style-name="ce21" office:value-type="float" office:value="11" calcext:value-type="float">
            <text:p>11</text:p>
          </table:table-cell>
          <table:table-cell table:style-name="ce11" office:value-type="string" calcext:value-type="string">
            <text:p>ロイヤリティ</text:p>
          </table:table-cell>
          <table:table-cell table:style-name="ce11" office:value-type="string" calcext:value-type="string">
            <text:p>ロイヤリティ (スターター)</text:p>
          </table:table-cell>
          <table:table-cell table:style-name="ce11" office:value-type="string" calcext:value-type="string">
            <text:p>ろいやりてぃ</text:p>
          </table:table-cell>
          <table:table-cell table:style-name="ce11" office:value-type="string" calcext:value-type="string">
            <text:p>伝説の武将デッキ</text:p>
          </table:table-cell>
          <table:table-cell table:style-name="ce11" table:formula="of:=VLOOKUP([.H12];[$収録番号.$A$1:$収録番号.$B$10];2;0)" office:value-type="float" office:value="10" calcext:value-type="float">
            <text:p>10</text:p>
          </table:table-cell>
          <table:table-cell table:style-name="ce11" office:value-type="string" calcext:value-type="string">
            <text:p>N</text:p>
          </table:table-cell>
          <table:table-cell table:style-name="ce11" table:formula="of:=VLOOKUP([.J1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2];[$種類番号.$A$1:$種類番号.$B$4];2;0)" office:value-type="float" office:value="3" calcext:value-type="float">
            <text:p>3</text:p>
          </table:table-cell>
          <table:table-cell table:style-name="ce11" office:value-type="string" calcext:value-type="string">
            <text:p>赤</text:p>
          </table:table-cell>
          <table:table-cell table:style-name="ce11" table:formula="of:=VLOOKUP([.N1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2];[$特性番号.$A$1:$特性番号.$B$8];2;0);0)" office:value-type="float" office:value="0" calcext:value-type="float">
            <text:p>0</text:p>
          </table:table-cell>
          <table:table-cell table:style-name="ce11" office:value-type="string" calcext:value-type="string">
            <text:p>自分の戦場の「剣術」イジン1体を破壊するか、自分の戦場のガーディアン1体を山札の上に戻す。3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11.png</text:p>
          </table:table-cell>
          <table:table-cell table:style-name="ce11" table:formula="of:=CONCATENATE([$JSON.$A$1];[.$C12];[$JSON.$B$1];[.$E12];[$JSON.$C$1];[.F12];[$JSON.$D$1];[.$G12];[$JSON.$E$1];IF(ISNA([.$T12]);&quot;null&quot;;&quot;&quot;&quot;&quot;&amp;[.$T12]&amp;&quot;&quot;&quot;&quot;);[$JSON.$F$1];[.$V12];[$JSON.$G$1];IF(ISNA([.$X12]);&quot;null&quot;;&quot;&quot;&quot;&quot;&amp;[.$X12]&amp;&quot;&quot;&quot;&quot;);[$JSON.$H$1];[.$AA12];[$JSON.$I$1];[.$I12];[$JSON.$J$1];[.K12];[$JSON.$K$1];[.$M12];[$JSON.$L$1];[.$P12];[$JSON.$M$1];[.$O12];[$JSON.$N$1];[.$S12];[$JSON.$O$1];[.$U12];[$JSON.$P$1];IF(ISNA([.$W12]);&quot;null&quot;;[.$W12]);[$JSON.$Q$1];[.$Y12];[$JSON.$R$1];IF([.$Z12];&quot;true&quot;;&quot;false&quot;);[$JSON.$S$1];[.$A12];[$JSON.$T$1];[.$B12];[$JSON.$U$1])" office:value-type="string" office:string-value="{&quot;id&quot;:&quot;R-11&quot;,&quot;name&quot;:&quot;ロイヤリティ&quot;,&quot;displayName&quot;:&quot;ロイヤリティ (スターター)&quot;,&quot;kana&quot;:&quot;ろいやりてぃ&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rarity&quot;:1,&quot;type&quot;:3,&quot;level&quot;:3,&quot;color&quot;:1,&quot;term&quot;:0,&quot;trait&quot;:0,&quot;power&quot;:null,&quot;legacy&quot;:2,&quot;anyNumCopies&quot;:false,&quot;orderTable&quot;:11,&quot;orderDeck&quot;:384}," calcext:value-type="string">
            <text:p>{"id":"R-11","name":"ロイヤリティ","displayName":"ロイヤリティ (スターター)","kana":"ろいやりてぃ","traitText":null,"ruleText":"自分の戦場の「剣術」イジン1体を破壊するか、自分の戦場のガーディアン1体を山札の上に戻す。3ドローする。","legacyText":"冥府発動","imageUrl":"https://one-draw.jp/ijinden/cardlist/R01/card/R_011.png","expansion":10,"rarity":1,"type":3,"level":3,"color":1,"term":0,"trait":0,"power":null,"legacy":2,"anyNumCopies":false,"orderTable":11,"orderDeck":384},</text:p>
          </table:table-cell>
          <table:table-cell table:number-columns-repeated="16356"/>
        </table:table-row>
        <table:table-row table:style-name="ro2">
          <table:table-cell table:style-name="ce11" office:value-type="float" office:value="12" calcext:value-type="float">
            <text:p>12</text:p>
          </table:table-cell>
          <table:table-cell table:style-name="ce11" office:value-type="float" office:value="385" calcext:value-type="float">
            <text:p>385</text:p>
          </table:table-cell>
          <table:table-cell table:style-name="ce21" office:value-type="string" calcext:value-type="string">
            <text:p>R-12</text:p>
          </table:table-cell>
          <table:table-cell table:style-name="ce21" office:value-type="float" office:value="12" calcext:value-type="float">
            <text:p>12</text:p>
          </table:table-cell>
          <table:table-cell table:style-name="ce11" office:value-type="string" calcext:value-type="string">
            <text:p>デスペラード</text:p>
          </table:table-cell>
          <table:table-cell table:style-name="ce11" table:formula="of:=[.E13]" office:value-type="string" office:string-value="デスペラード" calcext:value-type="string">
            <text:p>デスペラード</text:p>
          </table:table-cell>
          <table:table-cell table:style-name="ce11" office:value-type="string" calcext:value-type="string">
            <text:p>ですぺらーど</text:p>
          </table:table-cell>
          <table:table-cell table:style-name="ce11" office:value-type="string" calcext:value-type="string">
            <text:p>伝説の武将デッキ</text:p>
          </table:table-cell>
          <table:table-cell table:style-name="ce11" table:formula="of:=VLOOKUP([.H13];[$収録番号.$A$1:$収録番号.$B$10];2;0)" office:value-type="float" office:value="10" calcext:value-type="float">
            <text:p>10</text:p>
          </table:table-cell>
          <table:table-cell table:style-name="ce11" office:value-type="string" calcext:value-type="string">
            <text:p>N</text:p>
          </table:table-cell>
          <table:table-cell table:style-name="ce11" table:formula="of:=VLOOKUP([.J1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種類番号.$A$1:$種類番号.$B$4];2;0)" office:value-type="float" office:value="3" calcext:value-type="float">
            <text:p>3</text:p>
          </table:table-cell>
          <table:table-cell table:style-name="ce11" office:value-type="string" calcext:value-type="string">
            <text:p>赤</text:p>
          </table:table-cell>
          <table:table-cell table:style-name="ce11" table:formula="of:=VLOOKUP([.N13];[$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3];[$特性番号.$A$1:$特性番号.$B$8];2;0);0)" office:value-type="float" office:value="0" calcext:value-type="float">
            <text:p>0</text:p>
          </table:table-cell>
          <table:table-cell table:style-name="ce11" office:value-type="string" calcext:value-type="string">
            <text:p>自分の戦場のイジン1体と相手の戦場のガーディアン1体を指定して発動できる。そのイジンとガーディアン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3];[$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R01/card/R_012.png</text:p>
          </table:table-cell>
          <table:table-cell table:style-name="ce11" table:formula="of:=CONCATENATE([$JSON.$A$1];[.$C13];[$JSON.$B$1];[.$E13];[$JSON.$C$1];[.F13];[$JSON.$D$1];[.$G13];[$JSON.$E$1];IF(ISNA([.$T13]);&quot;null&quot;;&quot;&quot;&quot;&quot;&amp;[.$T13]&amp;&quot;&quot;&quot;&quot;);[$JSON.$F$1];[.$V13];[$JSON.$G$1];IF(ISNA([.$X13]);&quot;null&quot;;&quot;&quot;&quot;&quot;&amp;[.$X13]&amp;&quot;&quot;&quot;&quot;);[$JSON.$H$1];[.$AA13];[$JSON.$I$1];[.$I13];[$JSON.$J$1];[.K13];[$JSON.$K$1];[.$M13];[$JSON.$L$1];[.$P13];[$JSON.$M$1];[.$O13];[$JSON.$N$1];[.$S13];[$JSON.$O$1];[.$U13];[$JSON.$P$1];IF(ISNA([.$W13]);&quot;null&quot;;[.$W13]);[$JSON.$Q$1];[.$Y13];[$JSON.$R$1];IF([.$Z13];&quot;true&quot;;&quot;false&quot;);[$JSON.$S$1];[.$A13];[$JSON.$T$1];[.$B13];[$JSON.$U$1])" office:value-type="string" office:string-value="{&quot;id&quot;:&quot;R-12&quot;,&quot;name&quot;:&quot;デスペラード&quot;,&quot;displayName&quot;:&quot;デスペラード&quot;,&quot;kana&quot;:&quot;ですぺらーど&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rarity&quot;:1,&quot;type&quot;:3,&quot;level&quot;:3,&quot;color&quot;:1,&quot;term&quot;:0,&quot;trait&quot;:0,&quot;power&quot;:null,&quot;legacy&quot;:2,&quot;anyNumCopies&quot;:false,&quot;orderTable&quot;:12,&quot;orderDeck&quot;:385}," calcext:value-type="string">
            <text:p>{"id":"R-12","name":"デスペラード","displayName":"デスペラード","kana":"ですぺらーど","traitText":null,"ruleText":"自分の戦場のイジン1体と相手の戦場のガーディアン1体を指定して発動できる。そのイジンとガーディアンを破壊する。","legacyText":"冥府発動","imageUrl":"https://one-draw.jp/ijinden/cardlist/R01/card/R_012.png","expansion":10,"rarity":1,"type":3,"level":3,"color":1,"term":0,"trait":0,"power":null,"legacy":2,"anyNumCopies":false,"orderTable":12,"orderDeck":385},</text:p>
          </table:table-cell>
          <table:table-cell table:number-columns-repeated="16356"/>
        </table:table-row>
        <table:table-row table:style-name="ro2">
          <table:table-cell table:style-name="ce11" office:value-type="float" office:value="13" calcext:value-type="float">
            <text:p>13</text:p>
          </table:table-cell>
          <table:table-cell table:style-name="ce11" office:value-type="float" office:value="435" calcext:value-type="float">
            <text:p>435</text:p>
          </table:table-cell>
          <table:table-cell table:style-name="ce21" office:value-type="string" calcext:value-type="string">
            <text:p>R-13</text:p>
          </table:table-cell>
          <table:table-cell table:style-name="ce21" office:value-type="float" office:value="13" calcext:value-type="float">
            <text:p>13</text:p>
          </table:table-cell>
          <table:table-cell table:style-name="ce11" office:value-type="string" calcext:value-type="string">
            <text:p>レッドストーン</text:p>
          </table:table-cell>
          <table:table-cell table:style-name="ce11" office:value-type="string" calcext:value-type="string">
            <text:p>レッドストーン (スターター)</text:p>
          </table:table-cell>
          <table:table-cell table:style-name="ce11" office:value-type="string" calcext:value-type="string">
            <text:p>れっどすとーん</text:p>
          </table:table-cell>
          <table:table-cell table:style-name="ce11" office:value-type="string" calcext:value-type="string">
            <text:p>伝説の武将デッキ</text:p>
          </table:table-cell>
          <table:table-cell table:style-name="ce11" table:formula="of:=VLOOKUP([.H14];[$収録番号.$A$1:$収録番号.$B$10];2;0)" office:value-type="float" office:value="10" calcext:value-type="float">
            <text:p>10</text:p>
          </table:table-cell>
          <table:table-cell table:style-name="ce11" office:value-type="string" calcext:value-type="string">
            <text:p>N</text:p>
          </table:table-cell>
          <table:table-cell table:style-name="ce11" table:formula="of:=VLOOKUP([.J1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4];[$種類番号.$A$1:$種類番号.$B$4];2;0)" office:value-type="float" office:value="4" calcext:value-type="float">
            <text:p>4</text:p>
          </table:table-cell>
          <table:table-cell table:style-name="ce11" office:value-type="string" calcext:value-type="string">
            <text:p>赤</text:p>
          </table:table-cell>
          <table:table-cell table:style-name="ce11" table:formula="of:=VLOOKUP([.N14];[$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4];[$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4];[$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R01/card/R_013.png</text:p>
          </table:table-cell>
          <table:table-cell table:style-name="ce11" table:formula="of:=CONCATENATE([$JSON.$A$1];[.$C14];[$JSON.$B$1];[.$E14];[$JSON.$C$1];[.F14];[$JSON.$D$1];[.$G14];[$JSON.$E$1];IF(ISNA([.$T14]);&quot;null&quot;;&quot;&quot;&quot;&quot;&amp;[.$T14]&amp;&quot;&quot;&quot;&quot;);[$JSON.$F$1];[.$V14];[$JSON.$G$1];IF(ISNA([.$X14]);&quot;null&quot;;&quot;&quot;&quot;&quot;&amp;[.$X14]&amp;&quot;&quot;&quot;&quot;);[$JSON.$H$1];[.$AA14];[$JSON.$I$1];[.$I14];[$JSON.$J$1];[.K14];[$JSON.$K$1];[.$M14];[$JSON.$L$1];[.$P14];[$JSON.$M$1];[.$O14];[$JSON.$N$1];[.$S14];[$JSON.$O$1];[.$U14];[$JSON.$P$1];IF(ISNA([.$W14]);&quot;null&quot;;[.$W14]);[$JSON.$Q$1];[.$Y14];[$JSON.$R$1];IF([.$Z14];&quot;true&quot;;&quot;false&quot;);[$JSON.$S$1];[.$A14];[$JSON.$T$1];[.$B14];[$JSON.$U$1])" office:value-type="string" office:string-value="{&quot;id&quot;:&quot;R-13&quot;,&quot;name&quot;:&quot;レッドストーン&quot;,&quot;displayName&quot;:&quot;レッドストーン (スターター)&quot;,&quot;kana&quot;:&quot;れっどすとーん&quot;,&quot;traitText&quot;:null,&quot;ruleText&quot;:&quot;※デッキに何枚でも入れてよい。&quot;,&quot;legacyText&quot;:&quot;復元&quot;,&quot;imageUrl&quot;:&quot;https://one-draw.jp/ijinden/cardlist/R01/card/R_013.png&quot;,&quot;expansion&quot;:10,&quot;rarity&quot;:1,&quot;type&quot;:4,&quot;level&quot;:1,&quot;color&quot;:1,&quot;term&quot;:0,&quot;trait&quot;:0,&quot;power&quot;:null,&quot;legacy&quot;:3,&quot;anyNumCopies&quot;:true,&quot;orderTable&quot;:13,&quot;orderDeck&quot;:435}," calcext:value-type="string">
            <text:p>{"id":"R-13","name":"レッドストーン","displayName":"レッドストーン (スターター)","kana":"れっどすとーん","traitText":null,"ruleText":"※デッキに何枚でも入れてよい。","legacyText":"復元","imageUrl":"https://one-draw.jp/ijinden/cardlist/R01/card/R_013.png","expansion":10,"rarity":1,"type":4,"level":1,"color":1,"term":0,"trait":0,"power":null,"legacy":3,"anyNumCopies":true,"orderTable":13,"orderDeck":435},</text:p>
          </table:table-cell>
          <table:table-cell table:number-columns-repeated="16356"/>
        </table:table-row>
        <table:table-row table:style-name="ro2">
          <table:table-cell table:style-name="ce11" office:value-type="float" office:value="14" calcext:value-type="float">
            <text:p>14</text:p>
          </table:table-cell>
          <table:table-cell table:style-name="ce11" office:value-type="float" office:value="236" calcext:value-type="float">
            <text:p>236</text:p>
          </table:table-cell>
          <table:table-cell table:style-name="ce21" office:value-type="string" calcext:value-type="string">
            <text:p>B-1</text:p>
          </table:table-cell>
          <table:table-cell table:style-name="ce21" office:value-type="float" office:value="1" calcext:value-type="float">
            <text:p>1</text:p>
          </table:table-cell>
          <table:table-cell table:style-name="ce11" office:value-type="string" calcext:value-type="string">
            <text:p>レオナルド・ダ・ヴィンチ</text:p>
          </table:table-cell>
          <table:table-cell table:style-name="ce11" table:formula="of:=[.E15]" office:value-type="string" office:string-value="レオナルド・ダ・ヴィンチ" calcext:value-type="string">
            <text:p>レオナルド・ダ・ヴィンチ</text:p>
          </table:table-cell>
          <table:table-cell table:style-name="ce11" office:value-type="string" calcext:value-type="string">
            <text:p>れおなるどだゔぃんち</text:p>
          </table:table-cell>
          <table:table-cell table:style-name="ce11" office:value-type="string" calcext:value-type="string">
            <text:p>知と美の革命デッキ</text:p>
          </table:table-cell>
          <table:table-cell table:style-name="ce11" table:formula="of:=VLOOKUP([.H15];[$収録番号.$A$1:$収録番号.$B$10];2;0)" office:value-type="float" office:value="11" calcext:value-type="float">
            <text:p>11</text:p>
          </table:table-cell>
          <table:table-cell table:style-name="ce11" office:value-type="string" calcext:value-type="string">
            <text:p>SR</text:p>
          </table:table-cell>
          <table:table-cell table:style-name="ce11" table:formula="of:=VLOOKUP([.J1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能力語番号.$A$1:$能力語番号.$B$11];2;0);0)" office:value-type="float" office:value="0" calcext:value-type="float">
            <text:p>0</text:p>
          </table:table-cell>
          <table:table-cell office:value-type="string" calcext:value-type="string">
            <text:p>美術</text:p>
          </table:table-cell>
          <table:table-cell table:style-name="ce11" table:formula="of:=IFERROR(VLOOKUP([.$T15];[$特性番号.$A$1:$特性番号.$B$8];2;0);0)" office:value-type="float" office:value="2" calcext:value-type="float">
            <text:p>2</text:p>
          </table:table-cell>
          <table:table-cell table:style-name="ce11"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1.png</text:p>
          </table:table-cell>
          <table:table-cell table:style-name="ce11" table:formula="of:=CONCATENATE([$JSON.$A$1];[.$C15];[$JSON.$B$1];[.$E15];[$JSON.$C$1];[.F15];[$JSON.$D$1];[.$G15];[$JSON.$E$1];IF(ISNA([.$T15]);&quot;null&quot;;&quot;&quot;&quot;&quot;&amp;[.$T15]&amp;&quot;&quot;&quot;&quot;);[$JSON.$F$1];[.$V15];[$JSON.$G$1];IF(ISNA([.$X15]);&quot;null&quot;;&quot;&quot;&quot;&quot;&amp;[.$X15]&amp;&quot;&quot;&quot;&quot;);[$JSON.$H$1];[.$AA15];[$JSON.$I$1];[.$I15];[$JSON.$J$1];[.K15];[$JSON.$K$1];[.$M15];[$JSON.$L$1];[.$P15];[$JSON.$M$1];[.$O15];[$JSON.$N$1];[.$S15];[$JSON.$O$1];[.$U15];[$JSON.$P$1];IF(ISNA([.$W15]);&quot;null&quot;;[.$W15]);[$JSON.$Q$1];[.$Y15];[$JSON.$R$1];IF([.$Z15];&quot;true&quot;;&quot;false&quot;);[$JSON.$S$1];[.$A15];[$JSON.$T$1];[.$B15];[$JSON.$U$1])" office:value-type="string" office:string-value="{&quot;id&quot;:&quot;B-1&quot;,&quot;name&quot;:&quot;レオナルド・ダ・ヴィンチ&quot;,&quot;displayName&quot;:&quot;レオナルド・ダ・ヴィンチ&quot;,&quot;kana&quot;:&quot;れおなるどだゔぃんち&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rarity&quot;:4,&quot;type&quot;:1,&quot;level&quot;:6,&quot;color&quot;:2,&quot;term&quot;:0,&quot;trait&quot;:2,&quot;power&quot;:5000,&quot;legacy&quot;:0,&quot;anyNumCopies&quot;:false,&quot;orderTable&quot;:14,&quot;orderDeck&quot;:236}," calcext:value-type="string">
            <text:p>{"id":"B-1","name":"レオナルド・ダ・ヴィンチ","displayName":"レオナルド・ダ・ヴィンチ","kana":"れおなるどだゔぃんち","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rarity":4,"type":1,"level":6,"color":2,"term":0,"trait":2,"power":5000,"legacy":0,"anyNumCopies":false,"orderTable":14,"orderDeck":236},</text:p>
          </table:table-cell>
          <table:table-cell table:number-columns-repeated="16356"/>
        </table:table-row>
        <table:table-row table:style-name="ro2">
          <table:table-cell table:style-name="ce11" office:value-type="float" office:value="15" calcext:value-type="float">
            <text:p>15</text:p>
          </table:table-cell>
          <table:table-cell table:style-name="ce11" office:value-type="float" office:value="7" calcext:value-type="float">
            <text:p>7</text:p>
          </table:table-cell>
          <table:table-cell table:style-name="ce21" office:value-type="string" calcext:value-type="string">
            <text:p>B-2</text:p>
          </table:table-cell>
          <table:table-cell table:style-name="ce21" office:value-type="float" office:value="2" calcext:value-type="float">
            <text:p>2</text:p>
          </table:table-cell>
          <table:table-cell table:style-name="ce11" office:value-type="string" calcext:value-type="string">
            <text:p>ヴァスコ・ダ・ガマ</text:p>
          </table:table-cell>
          <table:table-cell table:style-name="ce11" table:formula="of:=[.E16]" office:value-type="string" office:string-value="ヴァスコ・ダ・ガマ" calcext:value-type="string">
            <text:p>ヴァスコ・ダ・ガマ</text:p>
          </table:table-cell>
          <table:table-cell table:style-name="ce11" office:value-type="string" calcext:value-type="string">
            <text:p>ゔぁすこだがま</text:p>
          </table:table-cell>
          <table:table-cell table:style-name="ce11" office:value-type="string" calcext:value-type="string">
            <text:p>知と美の革命デッキ</text:p>
          </table:table-cell>
          <table:table-cell table:style-name="ce11" table:formula="of:=VLOOKUP([.H16];[$収録番号.$A$1:$収録番号.$B$10];2;0)" office:value-type="float" office:value="11" calcext:value-type="float">
            <text:p>11</text:p>
          </table:table-cell>
          <table:table-cell table:style-name="ce11" office:value-type="string" calcext:value-type="string">
            <text:p>N</text:p>
          </table:table-cell>
          <table:table-cell table:style-name="ce11" table:formula="of:=VLOOKUP([.J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種類番号.$A$1:$種類番号.$B$4];2;0)" office:value-type="float" office:value="1" calcext:value-type="float">
            <text:p>1</text:p>
          </table:table-cell>
          <table:table-cell table:style-name="ce11" office:value-type="string" calcext:value-type="string">
            <text:p>青</text:p>
          </table:table-cell>
          <table:table-cell table:style-name="ce11" table:formula="of:=VLOOKUP([.N16];[$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6];[$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16];[$特性番号.$A$1:$特性番号.$B$8];2;0);0)" office:value-type="float" office:value="0" calcext:value-type="float">
            <text:p>0</text:p>
          </table:table-cell>
          <table:table-cell table:style-name="ce11" office:value-type="string" calcext:value-type="string">
            <text:p>航海 - アタッカーになったとき、1ドローして、自分の手札1枚を墓地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2.png</text:p>
          </table:table-cell>
          <table:table-cell table:style-name="ce11" table:formula="of:=CONCATENATE([$JSON.$A$1];[.$C16];[$JSON.$B$1];[.$E16];[$JSON.$C$1];[.F16];[$JSON.$D$1];[.$G16];[$JSON.$E$1];IF(ISNA([.$T16]);&quot;null&quot;;&quot;&quot;&quot;&quot;&amp;[.$T16]&amp;&quot;&quot;&quot;&quot;);[$JSON.$F$1];[.$V16];[$JSON.$G$1];IF(ISNA([.$X16]);&quot;null&quot;;&quot;&quot;&quot;&quot;&amp;[.$X16]&amp;&quot;&quot;&quot;&quot;);[$JSON.$H$1];[.$AA16];[$JSON.$I$1];[.$I16];[$JSON.$J$1];[.K16];[$JSON.$K$1];[.$M16];[$JSON.$L$1];[.$P16];[$JSON.$M$1];[.$O16];[$JSON.$N$1];[.$S16];[$JSON.$O$1];[.$U16];[$JSON.$P$1];IF(ISNA([.$W16]);&quot;null&quot;;[.$W16]);[$JSON.$Q$1];[.$Y16];[$JSON.$R$1];IF([.$Z16];&quot;true&quot;;&quot;false&quot;);[$JSON.$S$1];[.$A16];[$JSON.$T$1];[.$B16];[$JSON.$U$1])" office:value-type="string" office:string-value="{&quot;id&quot;:&quot;B-2&quot;,&quot;name&quot;:&quot;ヴァスコ・ダ・ガマ&quot;,&quot;displayName&quot;:&quot;ヴァスコ・ダ・ガマ&quot;,&quot;kana&quot;:&quot;ゔぁすこだがま&quot;,&quot;traitText&quot;:null,&quot;ruleText&quot;:&quot;航海 - アタッカーになったとき、1ドローして、自分の手札1枚を墓地に置く。&quot;,&quot;legacyText&quot;:&quot;1ドローする&quot;,&quot;imageUrl&quot;:&quot;https://one-draw.jp/ijinden/cardlist/B01/card/B_002.png&quot;,&quot;expansion&quot;:11,&quot;rarity&quot;:1,&quot;type&quot;:1,&quot;level&quot;:1,&quot;color&quot;:2,&quot;term&quot;:1,&quot;trait&quot;:0,&quot;power&quot;:1000,&quot;legacy&quot;:4,&quot;anyNumCopies&quot;:false,&quot;orderTable&quot;:15,&quot;orderDeck&quot;:7}," calcext:value-type="string">
            <text:p>{"id":"B-2","name":"ヴァスコ・ダ・ガマ","displayName":"ヴァスコ・ダ・ガマ","kana":"ゔぁすこだがま","traitText":null,"ruleText":"航海 - アタッカーになったとき、1ドローして、自分の手札1枚を墓地に置く。","legacyText":"1ドローする","imageUrl":"https://one-draw.jp/ijinden/cardlist/B01/card/B_002.png","expansion":11,"rarity":1,"type":1,"level":1,"color":2,"term":1,"trait":0,"power":1000,"legacy":4,"anyNumCopies":false,"orderTable":15,"orderDeck":7},</text:p>
          </table:table-cell>
          <table:table-cell table:number-columns-repeated="16356"/>
        </table:table-row>
        <table:table-row table:style-name="ro2">
          <table:table-cell table:style-name="ce11" office:value-type="float" office:value="16" calcext:value-type="float">
            <text:p>16</text:p>
          </table:table-cell>
          <table:table-cell table:style-name="ce11" office:value-type="float" office:value="41" calcext:value-type="float">
            <text:p>41</text:p>
          </table:table-cell>
          <table:table-cell table:style-name="ce21" office:value-type="string" calcext:value-type="string">
            <text:p>B-3</text:p>
          </table:table-cell>
          <table:table-cell table:style-name="ce21" office:value-type="float" office:value="3" calcext:value-type="float">
            <text:p>3</text:p>
          </table:table-cell>
          <table:table-cell table:style-name="ce11" office:value-type="string" calcext:value-type="string">
            <text:p>好太王</text:p>
          </table:table-cell>
          <table:table-cell table:style-name="ce11" table:formula="of:=[.E17]" office:value-type="string" office:string-value="好太王" calcext:value-type="string">
            <text:p>好太王</text:p>
          </table:table-cell>
          <table:table-cell table:style-name="ce11" office:value-type="string" calcext:value-type="string">
            <text:p>こうたいおう</text:p>
          </table:table-cell>
          <table:table-cell table:style-name="ce11" office:value-type="string" calcext:value-type="string">
            <text:p>知と美の革命デッキ</text:p>
          </table:table-cell>
          <table:table-cell table:style-name="ce11" table:formula="of:=VLOOKUP([.H17];[$収録番号.$A$1:$収録番号.$B$10];2;0)" office:value-type="float" office:value="11" calcext:value-type="float">
            <text:p>11</text:p>
          </table:table-cell>
          <table:table-cell table:style-name="ce11" office:value-type="string" calcext:value-type="string">
            <text:p>N</text:p>
          </table:table-cell>
          <table:table-cell table:style-name="ce11" table:formula="of:=VLOOKUP([.J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種類番号.$A$1:$種類番号.$B$4];2;0)" office:value-type="float" office:value="1" calcext:value-type="float">
            <text:p>1</text:p>
          </table:table-cell>
          <table:table-cell table:style-name="ce11" office:value-type="string" calcext:value-type="string">
            <text:p>青</text:p>
          </table:table-cell>
          <table:table-cell table:style-name="ce11" table:formula="of:=VLOOKUP([.N17];[$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7];[$特性番号.$A$1:$特性番号.$B$8];2;0);0)" office:value-type="float" office:value="0" calcext:value-type="float">
            <text:p>0</text:p>
          </table:table-cell>
          <table:table-cell table:style-name="ce11" office:value-type="string" calcext:value-type="string">
            <text:p>パワー1000以下のイジンにブロックされない。¶ブロッカーにな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3.png</text:p>
          </table:table-cell>
          <table:table-cell table:style-name="ce11" table:formula="of:=CONCATENATE([$JSON.$A$1];[.$C17];[$JSON.$B$1];[.$E17];[$JSON.$C$1];[.F17];[$JSON.$D$1];[.$G17];[$JSON.$E$1];IF(ISNA([.$T17]);&quot;null&quot;;&quot;&quot;&quot;&quot;&amp;[.$T17]&amp;&quot;&quot;&quot;&quot;);[$JSON.$F$1];[.$V17];[$JSON.$G$1];IF(ISNA([.$X17]);&quot;null&quot;;&quot;&quot;&quot;&quot;&amp;[.$X17]&amp;&quot;&quot;&quot;&quot;);[$JSON.$H$1];[.$AA17];[$JSON.$I$1];[.$I17];[$JSON.$J$1];[.K17];[$JSON.$K$1];[.$M17];[$JSON.$L$1];[.$P17];[$JSON.$M$1];[.$O17];[$JSON.$N$1];[.$S17];[$JSON.$O$1];[.$U17];[$JSON.$P$1];IF(ISNA([.$W17]);&quot;null&quot;;[.$W17]);[$JSON.$Q$1];[.$Y17];[$JSON.$R$1];IF([.$Z17];&quot;true&quot;;&quot;false&quot;);[$JSON.$S$1];[.$A17];[$JSON.$T$1];[.$B17];[$JSON.$U$1])" office:value-type="string" office:string-value="{&quot;id&quot;:&quot;B-3&quot;,&quot;name&quot;:&quot;好太王&quot;,&quot;displayName&quot;:&quot;好太王&quot;,&quot;kana&quot;:&quot;こうたいおう&quot;,&quot;traitText&quot;:null,&quot;ruleText&quot;:&quot;パワー1000以下のイジンにブロックされない。¶ブロッカーになれない。&quot;,&quot;legacyText&quot;:&quot;1ドローする&quot;,&quot;imageUrl&quot;:&quot;https://one-draw.jp/ijinden/cardlist/B01/card/B_003.png&quot;,&quot;expansion&quot;:11,&quot;rarity&quot;:1,&quot;type&quot;:1,&quot;level&quot;:2,&quot;color&quot;:2,&quot;term&quot;:0,&quot;trait&quot;:0,&quot;power&quot;:1000,&quot;legacy&quot;:4,&quot;anyNumCopies&quot;:false,&quot;orderTable&quot;:16,&quot;orderDeck&quot;:41}," calcext:value-type="string">
            <text:p>{"id":"B-3","name":"好太王","displayName":"好太王","kana":"こうたいおう","traitText":null,"ruleText":"パワー1000以下のイジンにブロックされない。¶ブロッカーになれない。","legacyText":"1ドローする","imageUrl":"https://one-draw.jp/ijinden/cardlist/B01/card/B_003.png","expansion":11,"rarity":1,"type":1,"level":2,"color":2,"term":0,"trait":0,"power":1000,"legacy":4,"anyNumCopies":false,"orderTable":16,"orderDeck":41},</text:p>
          </table:table-cell>
          <table:table-cell table:number-columns-repeated="16356"/>
        </table:table-row>
        <table:table-row table:style-name="ro2">
          <table:table-cell table:style-name="ce11" office:value-type="float" office:value="17" calcext:value-type="float">
            <text:p>17</text:p>
          </table:table-cell>
          <table:table-cell table:style-name="ce11" office:value-type="float" office:value="95" calcext:value-type="float">
            <text:p>95</text:p>
          </table:table-cell>
          <table:table-cell table:style-name="ce21" office:value-type="string" calcext:value-type="string">
            <text:p>B-4</text:p>
          </table:table-cell>
          <table:table-cell table:style-name="ce21" office:value-type="float" office:value="4" calcext:value-type="float">
            <text:p>4</text:p>
          </table:table-cell>
          <table:table-cell table:style-name="ce11" office:value-type="string" calcext:value-type="string">
            <text:p>フェルディナンド・マゼラン</text:p>
          </table:table-cell>
          <table:table-cell table:style-name="ce11" office:value-type="string" calcext:value-type="string">
            <text:p>フェルディナンド・マゼラン (スターター)</text:p>
          </table:table-cell>
          <table:table-cell table:style-name="ce11" office:value-type="string" calcext:value-type="string">
            <text:p>ふぇるでぃなんどまぜらん</text:p>
          </table:table-cell>
          <table:table-cell table:style-name="ce11" office:value-type="string" calcext:value-type="string">
            <text:p>知と美の革命デッキ</text:p>
          </table:table-cell>
          <table:table-cell table:style-name="ce11" table:formula="of:=VLOOKUP([.H18];[$収録番号.$A$1:$収録番号.$B$10];2;0)" office:value-type="float" office:value="11" calcext:value-type="float">
            <text:p>11</text:p>
          </table:table-cell>
          <table:table-cell table:style-name="ce11" office:value-type="string" calcext:value-type="string">
            <text:p>N</text:p>
          </table:table-cell>
          <table:table-cell table:style-name="ce11" table:formula="of:=VLOOKUP([.J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種類番号.$A$1:$種類番号.$B$4];2;0)" office:value-type="float" office:value="1" calcext:value-type="float">
            <text:p>1</text:p>
          </table:table-cell>
          <table:table-cell table:style-name="ce11" office:value-type="string" calcext:value-type="string">
            <text:p>青</text:p>
          </table:table-cell>
          <table:table-cell table:style-name="ce11" table:formula="of:=VLOOKUP([.N18];[$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8];[$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18];[$特性番号.$A$1:$特性番号.$B$8];2;0);0)" office:value-type="float" office:value="0" calcext:value-type="float">
            <text:p>0</text:p>
          </table:table-cell>
          <table:table-cell table:style-name="ce11" office:value-type="string" calcext:value-type="string">
            <text:p>航海 - アタッカーになったとき、相手の手札のカード1つを墓地に置く。そのカードは相手が選ぶ。</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4.png</text:p>
          </table:table-cell>
          <table:table-cell table:style-name="ce11" table:formula="of:=CONCATENATE([$JSON.$A$1];[.$C18];[$JSON.$B$1];[.$E18];[$JSON.$C$1];[.F18];[$JSON.$D$1];[.$G18];[$JSON.$E$1];IF(ISNA([.$T18]);&quot;null&quot;;&quot;&quot;&quot;&quot;&amp;[.$T18]&amp;&quot;&quot;&quot;&quot;);[$JSON.$F$1];[.$V18];[$JSON.$G$1];IF(ISNA([.$X18]);&quot;null&quot;;&quot;&quot;&quot;&quot;&amp;[.$X18]&amp;&quot;&quot;&quot;&quot;);[$JSON.$H$1];[.$AA18];[$JSON.$I$1];[.$I18];[$JSON.$J$1];[.K18];[$JSON.$K$1];[.$M18];[$JSON.$L$1];[.$P18];[$JSON.$M$1];[.$O18];[$JSON.$N$1];[.$S18];[$JSON.$O$1];[.$U18];[$JSON.$P$1];IF(ISNA([.$W18]);&quot;null&quot;;[.$W18]);[$JSON.$Q$1];[.$Y18];[$JSON.$R$1];IF([.$Z18];&quot;true&quot;;&quot;false&quot;);[$JSON.$S$1];[.$A18];[$JSON.$T$1];[.$B18];[$JSON.$U$1])" office:value-type="string" office:string-value="{&quot;id&quot;:&quot;B-4&quot;,&quot;name&quot;:&quot;フェルディナンド・マゼラン&quot;,&quot;displayName&quot;:&quot;フェルディナンド・マゼラン (スターター)&quot;,&quot;kana&quot;:&quot;ふぇるでぃなんどまぜらん&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rarity&quot;:1,&quot;type&quot;:1,&quot;level&quot;:3,&quot;color&quot;:2,&quot;term&quot;:1,&quot;trait&quot;:0,&quot;power&quot;:3000,&quot;legacy&quot;:0,&quot;anyNumCopies&quot;:false,&quot;orderTable&quot;:17,&quot;orderDeck&quot;:95}," calcext:value-type="string">
            <text:p>{"id":"B-4","name":"フェルディナンド・マゼラン","displayName":"フェルディナンド・マゼラン (スターター)","kana":"ふぇるでぃなんどまぜらん","traitText":null,"ruleText":"航海 - アタッカーになったとき、相手の手札のカード1つを墓地に置く。そのカードは相手が選ぶ。","legacyText":null,"imageUrl":"https://one-draw.jp/ijinden/cardlist/B01/card/B_004.png","expansion":11,"rarity":1,"type":1,"level":3,"color":2,"term":1,"trait":0,"power":3000,"legacy":0,"anyNumCopies":false,"orderTable":17,"orderDeck":95},</text:p>
          </table:table-cell>
          <table:table-cell table:number-columns-repeated="16356"/>
        </table:table-row>
        <table:table-row table:style-name="ro2">
          <table:table-cell table:style-name="ce11" office:value-type="float" office:value="18" calcext:value-type="float">
            <text:p>18</text:p>
          </table:table-cell>
          <table:table-cell table:style-name="ce11" office:value-type="float" office:value="96" calcext:value-type="float">
            <text:p>96</text:p>
          </table:table-cell>
          <table:table-cell table:style-name="ce21" office:value-type="string" calcext:value-type="string">
            <text:p>B-5</text:p>
          </table:table-cell>
          <table:table-cell table:style-name="ce21" office:value-type="float" office:value="5" calcext:value-type="float">
            <text:p>5</text:p>
          </table:table-cell>
          <table:table-cell table:style-name="ce11" office:value-type="string" calcext:value-type="string">
            <text:p>ラファエロ・サンティ</text:p>
          </table:table-cell>
          <table:table-cell table:style-name="ce11" table:formula="of:=[.E19]" office:value-type="string" office:string-value="ラファエロ・サンティ" calcext:value-type="string">
            <text:p>ラファエロ・サンティ</text:p>
          </table:table-cell>
          <table:table-cell table:style-name="ce11" office:value-type="string" calcext:value-type="string">
            <text:p>らふぁえろさんてぃ</text:p>
          </table:table-cell>
          <table:table-cell table:style-name="ce11" office:value-type="string" calcext:value-type="string">
            <text:p>知と美の革命デッキ</text:p>
          </table:table-cell>
          <table:table-cell table:style-name="ce11" table:formula="of:=VLOOKUP([.H19];[$収録番号.$A$1:$収録番号.$B$10];2;0)" office:value-type="float" office:value="11" calcext:value-type="float">
            <text:p>11</text:p>
          </table:table-cell>
          <table:table-cell table:style-name="ce11" office:value-type="string" calcext:value-type="string">
            <text:p>N</text:p>
          </table:table-cell>
          <table:table-cell table:style-name="ce11" table:formula="of:=VLOOKUP([.J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9];[$種類番号.$A$1:$種類番号.$B$4];2;0)" office:value-type="float" office:value="1" calcext:value-type="float">
            <text:p>1</text:p>
          </table:table-cell>
          <table:table-cell table:style-name="ce11" office:value-type="string" calcext:value-type="string">
            <text:p>青</text:p>
          </table:table-cell>
          <table:table-cell table:style-name="ce11" table:formula="of:=VLOOKUP([.N19];[$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9];[$能力語番号.$A$1:$能力語番号.$B$11];2;0);0)" office:value-type="float" office:value="0" calcext:value-type="float">
            <text:p>0</text:p>
          </table:table-cell>
          <table:table-cell office:value-type="string" calcext:value-type="string">
            <text:p>美術</text:p>
          </table:table-cell>
          <table:table-cell table:style-name="ce11" table:formula="of:=IFERROR(VLOOKUP([.$T19];[$特性番号.$A$1:$特性番号.$B$8];2;0);0)" office:value-type="float" office:value="2" calcext:value-type="float">
            <text:p>2</text:p>
          </table:table-cell>
          <table:table-cell table:style-name="ce11" office:value-type="string" calcext:value-type="string">
            <text:p>戦場に置かれたとき、自分の墓地のイジン1体かハイケイ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5.png</text:p>
          </table:table-cell>
          <table:table-cell table:style-name="ce11" table:formula="of:=CONCATENATE([$JSON.$A$1];[.$C19];[$JSON.$B$1];[.$E19];[$JSON.$C$1];[.F19];[$JSON.$D$1];[.$G19];[$JSON.$E$1];IF(ISNA([.$T19]);&quot;null&quot;;&quot;&quot;&quot;&quot;&amp;[.$T19]&amp;&quot;&quot;&quot;&quot;);[$JSON.$F$1];[.$V19];[$JSON.$G$1];IF(ISNA([.$X19]);&quot;null&quot;;&quot;&quot;&quot;&quot;&amp;[.$X19]&amp;&quot;&quot;&quot;&quot;);[$JSON.$H$1];[.$AA19];[$JSON.$I$1];[.$I19];[$JSON.$J$1];[.K19];[$JSON.$K$1];[.$M19];[$JSON.$L$1];[.$P19];[$JSON.$M$1];[.$O19];[$JSON.$N$1];[.$S19];[$JSON.$O$1];[.$U19];[$JSON.$P$1];IF(ISNA([.$W19]);&quot;null&quot;;[.$W19]);[$JSON.$Q$1];[.$Y19];[$JSON.$R$1];IF([.$Z19];&quot;true&quot;;&quot;false&quot;);[$JSON.$S$1];[.$A19];[$JSON.$T$1];[.$B19];[$JSON.$U$1])" office:value-type="string" office:string-value="{&quot;id&quot;:&quot;B-5&quot;,&quot;name&quot;:&quot;ラファエロ・サンティ&quot;,&quot;displayName&quot;:&quot;ラファエロ・サンティ&quot;,&quot;kana&quot;:&quot;らふぁえろさんてぃ&quot;,&quot;traitText&quot;:&quot;美術&quot;,&quot;ruleText&quot;:&quot;戦場に置かれたとき、自分の墓地のイジン1体かハイケイ1つを手札に戻す。&quot;,&quot;legacyText&quot;:null,&quot;imageUrl&quot;:&quot;https://one-draw.jp/ijinden/cardlist/B01/card/B_005.png&quot;,&quot;expansion&quot;:11,&quot;rarity&quot;:1,&quot;type&quot;:1,&quot;level&quot;:3,&quot;color&quot;:2,&quot;term&quot;:0,&quot;trait&quot;:2,&quot;power&quot;:3000,&quot;legacy&quot;:0,&quot;anyNumCopies&quot;:false,&quot;orderTable&quot;:18,&quot;orderDeck&quot;:96}," calcext:value-type="string">
            <text:p>{"id":"B-5","name":"ラファエロ・サンティ","displayName":"ラファエロ・サンティ","kana":"らふぁえろさんてぃ","traitText":"美術","ruleText":"戦場に置かれたとき、自分の墓地のイジン1体かハイケイ1つを手札に戻す。","legacyText":null,"imageUrl":"https://one-draw.jp/ijinden/cardlist/B01/card/B_005.png","expansion":11,"rarity":1,"type":1,"level":3,"color":2,"term":0,"trait":2,"power":3000,"legacy":0,"anyNumCopies":false,"orderTable":18,"orderDeck":96},</text:p>
          </table:table-cell>
          <table:table-cell table:number-columns-repeated="16356"/>
        </table:table-row>
        <table:table-row table:style-name="ro2">
          <table:table-cell table:style-name="ce11" office:value-type="float" office:value="19" calcext:value-type="float">
            <text:p>19</text:p>
          </table:table-cell>
          <table:table-cell table:style-name="ce11" office:value-type="float" office:value="42" calcext:value-type="float">
            <text:p>42</text:p>
          </table:table-cell>
          <table:table-cell table:style-name="ce21" office:value-type="string" calcext:value-type="string">
            <text:p>B-6</text:p>
          </table:table-cell>
          <table:table-cell table:style-name="ce21" office:value-type="float" office:value="6" calcext:value-type="float">
            <text:p>6</text:p>
          </table:table-cell>
          <table:table-cell table:style-name="ce11" office:value-type="string" calcext:value-type="string">
            <text:p>ジャン・カルヴァン</text:p>
          </table:table-cell>
          <table:table-cell table:style-name="ce11" office:value-type="string" calcext:value-type="string">
            <text:p>ジャン・カルヴァン (スターター)</text:p>
          </table:table-cell>
          <table:table-cell table:style-name="ce11" office:value-type="string" calcext:value-type="string">
            <text:p>じゃんかるゔぁん</text:p>
          </table:table-cell>
          <table:table-cell table:style-name="ce11" office:value-type="string" calcext:value-type="string">
            <text:p>知と美の革命デッキ</text:p>
          </table:table-cell>
          <table:table-cell table:style-name="ce11" table:formula="of:=VLOOKUP([.H20];[$収録番号.$A$1:$収録番号.$B$10];2;0)" office:value-type="float" office:value="11" calcext:value-type="float">
            <text:p>11</text:p>
          </table:table-cell>
          <table:table-cell table:style-name="ce11" office:value-type="string" calcext:value-type="string">
            <text:p>N</text:p>
          </table:table-cell>
          <table:table-cell table:style-name="ce11" table:formula="of:=VLOOKUP([.J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0];[$種類番号.$A$1:$種類番号.$B$4];2;0)" office:value-type="float" office:value="1" calcext:value-type="float">
            <text:p>1</text:p>
          </table:table-cell>
          <table:table-cell table:style-name="ce11" office:value-type="string" calcext:value-type="string">
            <text:p>青</text:p>
          </table:table-cell>
          <table:table-cell table:style-name="ce11" table:formula="of:=VLOOKUP([.N20];[$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0];[$特性番号.$A$1:$特性番号.$B$8];2;0);0)" office:value-type="float" office:value="0" calcext:value-type="float">
            <text:p>0</text:p>
          </table:table-cell>
          <table:table-cell table:style-name="ce11"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6.png</text:p>
          </table:table-cell>
          <table:table-cell table:style-name="ce11" table:formula="of:=CONCATENATE([$JSON.$A$1];[.$C20];[$JSON.$B$1];[.$E20];[$JSON.$C$1];[.F20];[$JSON.$D$1];[.$G20];[$JSON.$E$1];IF(ISNA([.$T20]);&quot;null&quot;;&quot;&quot;&quot;&quot;&amp;[.$T20]&amp;&quot;&quot;&quot;&quot;);[$JSON.$F$1];[.$V20];[$JSON.$G$1];IF(ISNA([.$X20]);&quot;null&quot;;&quot;&quot;&quot;&quot;&amp;[.$X20]&amp;&quot;&quot;&quot;&quot;);[$JSON.$H$1];[.$AA20];[$JSON.$I$1];[.$I20];[$JSON.$J$1];[.K20];[$JSON.$K$1];[.$M20];[$JSON.$L$1];[.$P20];[$JSON.$M$1];[.$O20];[$JSON.$N$1];[.$S20];[$JSON.$O$1];[.$U20];[$JSON.$P$1];IF(ISNA([.$W20]);&quot;null&quot;;[.$W20]);[$JSON.$Q$1];[.$Y20];[$JSON.$R$1];IF([.$Z20];&quot;true&quot;;&quot;false&quot;);[$JSON.$S$1];[.$A20];[$JSON.$T$1];[.$B20];[$JSON.$U$1])" office:value-type="string" office:string-value="{&quot;id&quot;:&quot;B-6&quot;,&quot;name&quot;:&quot;ジャン・カルヴァン&quot;,&quot;displayName&quot;:&quot;ジャン・カルヴァン (スターター)&quot;,&quot;kana&quot;:&quot;じゃんかるゔぁん&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rarity&quot;:1,&quot;type&quot;:1,&quot;level&quot;:2,&quot;color&quot;:2,&quot;term&quot;:0,&quot;trait&quot;:0,&quot;power&quot;:1000,&quot;legacy&quot;:4,&quot;anyNumCopies&quot;:false,&quot;orderTable&quot;:19,&quot;orderDeck&quot;:42}," calcext:value-type="string">
            <text:p>{"id":"B-6","name":"ジャン・カルヴァン","displayName":"ジャン・カルヴァン (スターター)","kana":"じゃんかるゔぁん","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rarity":1,"type":1,"level":2,"color":2,"term":0,"trait":0,"power":1000,"legacy":4,"anyNumCopies":false,"orderTable":19,"orderDeck":42},</text:p>
          </table:table-cell>
          <table:table-cell table:number-columns-repeated="16356"/>
        </table:table-row>
        <table:table-row table:style-name="ro2">
          <table:table-cell table:style-name="ce11" office:value-type="float" office:value="20" calcext:value-type="float">
            <text:p>20</text:p>
          </table:table-cell>
          <table:table-cell table:style-name="ce11" office:value-type="float" office:value="97" calcext:value-type="float">
            <text:p>97</text:p>
          </table:table-cell>
          <table:table-cell table:style-name="ce21" office:value-type="string" calcext:value-type="string">
            <text:p>B-7</text:p>
          </table:table-cell>
          <table:table-cell table:style-name="ce21" office:value-type="float" office:value="7" calcext:value-type="float">
            <text:p>7</text:p>
          </table:table-cell>
          <table:table-cell table:style-name="ce11" office:value-type="string" calcext:value-type="string">
            <text:p>武帝</text:p>
          </table:table-cell>
          <table:table-cell table:style-name="ce11" table:formula="of:=[.E21]" office:value-type="string" office:string-value="武帝" calcext:value-type="string">
            <text:p>武帝</text:p>
          </table:table-cell>
          <table:table-cell table:style-name="ce11" office:value-type="string" calcext:value-type="string">
            <text:p>ぶてい</text:p>
          </table:table-cell>
          <table:table-cell table:style-name="ce11" office:value-type="string" calcext:value-type="string">
            <text:p>知と美の革命デッキ</text:p>
          </table:table-cell>
          <table:table-cell table:style-name="ce11" table:formula="of:=VLOOKUP([.H21];[$収録番号.$A$1:$収録番号.$B$10];2;0)" office:value-type="float" office:value="11" calcext:value-type="float">
            <text:p>11</text:p>
          </table:table-cell>
          <table:table-cell table:style-name="ce11" office:value-type="string" calcext:value-type="string">
            <text:p>N</text:p>
          </table:table-cell>
          <table:table-cell table:style-name="ce11" table:formula="of:=VLOOKUP([.J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種類番号.$A$1:$種類番号.$B$4];2;0)" office:value-type="float" office:value="1" calcext:value-type="float">
            <text:p>1</text:p>
          </table:table-cell>
          <table:table-cell table:style-name="ce11" office:value-type="string" calcext:value-type="string">
            <text:p>青</text:p>
          </table:table-cell>
          <table:table-cell table:style-name="ce11" table:formula="of:=VLOOKUP([.N21];[$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1];[$特性番号.$A$1:$特性番号.$B$8];2;0);0)" office:value-type="float" office:value="0" calcext:value-type="float">
            <text:p>0</text:p>
          </table:table-cell>
          <table:table-cell table:style-name="ce11" office:value-type="string" calcext:value-type="string">
            <text:p>自分の戦場のイジン1体につき「パワー+1000」を得る。¶パワー5000以上の間「ダブルプレッシャー」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7.png</text:p>
          </table:table-cell>
          <table:table-cell table:style-name="ce11" table:formula="of:=CONCATENATE([$JSON.$A$1];[.$C21];[$JSON.$B$1];[.$E21];[$JSON.$C$1];[.F21];[$JSON.$D$1];[.$G21];[$JSON.$E$1];IF(ISNA([.$T21]);&quot;null&quot;;&quot;&quot;&quot;&quot;&amp;[.$T21]&amp;&quot;&quot;&quot;&quot;);[$JSON.$F$1];[.$V21];[$JSON.$G$1];IF(ISNA([.$X21]);&quot;null&quot;;&quot;&quot;&quot;&quot;&amp;[.$X21]&amp;&quot;&quot;&quot;&quot;);[$JSON.$H$1];[.$AA21];[$JSON.$I$1];[.$I21];[$JSON.$J$1];[.K21];[$JSON.$K$1];[.$M21];[$JSON.$L$1];[.$P21];[$JSON.$M$1];[.$O21];[$JSON.$N$1];[.$S21];[$JSON.$O$1];[.$U21];[$JSON.$P$1];IF(ISNA([.$W21]);&quot;null&quot;;[.$W21]);[$JSON.$Q$1];[.$Y21];[$JSON.$R$1];IF([.$Z21];&quot;true&quot;;&quot;false&quot;);[$JSON.$S$1];[.$A21];[$JSON.$T$1];[.$B21];[$JSON.$U$1])" office:value-type="string" office:string-value="{&quot;id&quot;:&quot;B-7&quot;,&quot;name&quot;:&quot;武帝&quot;,&quot;displayName&quot;:&quot;武帝&quot;,&quot;kana&quot;:&quot;ぶてい&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rarity&quot;:1,&quot;type&quot;:1,&quot;level&quot;:3,&quot;color&quot;:2,&quot;term&quot;:0,&quot;trait&quot;:0,&quot;power&quot;:2000,&quot;legacy&quot;:0,&quot;anyNumCopies&quot;:false,&quot;orderTable&quot;:20,&quot;orderDeck&quot;:97}," calcext:value-type="string">
            <text:p>{"id":"B-7","name":"武帝","displayName":"武帝","kana":"ぶてい","traitText":null,"ruleText":"自分の戦場のイジン1体につき「パワー+1000」を得る。¶パワー5000以上の間「ダブルプレッシャー」を得る。","legacyText":null,"imageUrl":"https://one-draw.jp/ijinden/cardlist/B01/card/B_007.png","expansion":11,"rarity":1,"type":1,"level":3,"color":2,"term":0,"trait":0,"power":2000,"legacy":0,"anyNumCopies":false,"orderTable":20,"orderDeck":97},</text:p>
          </table:table-cell>
          <table:table-cell table:number-columns-repeated="16356"/>
        </table:table-row>
        <table:table-row table:style-name="ro2">
          <table:table-cell table:style-name="ce11" office:value-type="float" office:value="21" calcext:value-type="float">
            <text:p>21</text:p>
          </table:table-cell>
          <table:table-cell table:style-name="ce11" office:value-type="float" office:value="195" calcext:value-type="float">
            <text:p>195</text:p>
          </table:table-cell>
          <table:table-cell table:style-name="ce21" office:value-type="string" calcext:value-type="string">
            <text:p>B-8</text:p>
          </table:table-cell>
          <table:table-cell table:style-name="ce21" office:value-type="float" office:value="8" calcext:value-type="float">
            <text:p>8</text:p>
          </table:table-cell>
          <table:table-cell table:style-name="ce11" office:value-type="string" calcext:value-type="string">
            <text:p>楊貴妃</text:p>
          </table:table-cell>
          <table:table-cell table:style-name="ce11" table:formula="of:=[.E22]" office:value-type="string" office:string-value="楊貴妃" calcext:value-type="string">
            <text:p>楊貴妃</text:p>
          </table:table-cell>
          <table:table-cell table:style-name="ce11" office:value-type="string" calcext:value-type="string">
            <text:p>ようきひ</text:p>
          </table:table-cell>
          <table:table-cell table:style-name="ce11" office:value-type="string" calcext:value-type="string">
            <text:p>知と美の革命デッキ</text:p>
          </table:table-cell>
          <table:table-cell table:style-name="ce11" table:formula="of:=VLOOKUP([.H22];[$収録番号.$A$1:$収録番号.$B$10];2;0)" office:value-type="float" office:value="11" calcext:value-type="float">
            <text:p>11</text:p>
          </table:table-cell>
          <table:table-cell table:style-name="ce11" office:value-type="string" calcext:value-type="string">
            <text:p>N</text:p>
          </table:table-cell>
          <table:table-cell table:style-name="ce11" table:formula="of:=VLOOKUP([.J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2];[$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2];[$特性番号.$A$1:$特性番号.$B$8];2;0);0)" office:value-type="float" office:value="0" calcext:value-type="float">
            <text:p>0</text:p>
          </table:table-cell>
          <table:table-cell table:style-name="ce11" office:value-type="string" calcext:value-type="string">
            <text:p>戦場に置かれたとき、自分の戦場のイジン1体を破壊して発動できる。3ドローする。¶自分の手札が5枚以上の間「イジンにブロックされない」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8.png</text:p>
          </table:table-cell>
          <table:table-cell table:style-name="ce11" table:formula="of:=CONCATENATE([$JSON.$A$1];[.$C22];[$JSON.$B$1];[.$E22];[$JSON.$C$1];[.F22];[$JSON.$D$1];[.$G22];[$JSON.$E$1];IF(ISNA([.$T22]);&quot;null&quot;;&quot;&quot;&quot;&quot;&amp;[.$T22]&amp;&quot;&quot;&quot;&quot;);[$JSON.$F$1];[.$V22];[$JSON.$G$1];IF(ISNA([.$X22]);&quot;null&quot;;&quot;&quot;&quot;&quot;&amp;[.$X22]&amp;&quot;&quot;&quot;&quot;);[$JSON.$H$1];[.$AA22];[$JSON.$I$1];[.$I22];[$JSON.$J$1];[.K22];[$JSON.$K$1];[.$M22];[$JSON.$L$1];[.$P22];[$JSON.$M$1];[.$O22];[$JSON.$N$1];[.$S22];[$JSON.$O$1];[.$U22];[$JSON.$P$1];IF(ISNA([.$W22]);&quot;null&quot;;[.$W22]);[$JSON.$Q$1];[.$Y22];[$JSON.$R$1];IF([.$Z22];&quot;true&quot;;&quot;false&quot;);[$JSON.$S$1];[.$A22];[$JSON.$T$1];[.$B22];[$JSON.$U$1])" office:value-type="string" office:string-value="{&quot;id&quot;:&quot;B-8&quot;,&quot;name&quot;:&quot;楊貴妃&quot;,&quot;displayName&quot;:&quot;楊貴妃&quot;,&quot;kana&quot;:&quot;ようきひ&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rarity&quot;:1,&quot;type&quot;:1,&quot;level&quot;:5,&quot;color&quot;:2,&quot;term&quot;:0,&quot;trait&quot;:0,&quot;power&quot;:1000,&quot;legacy&quot;:0,&quot;anyNumCopies&quot;:false,&quot;orderTable&quot;:21,&quot;orderDeck&quot;:195}," calcext:value-type="string">
            <text:p>{"id":"B-8","name":"楊貴妃","displayName":"楊貴妃","kana":"ようきひ","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rarity":1,"type":1,"level":5,"color":2,"term":0,"trait":0,"power":1000,"legacy":0,"anyNumCopies":false,"orderTable":21,"orderDeck":195},</text:p>
          </table:table-cell>
          <table:table-cell table:number-columns-repeated="16356"/>
        </table:table-row>
        <table:table-row table:style-name="ro2">
          <table:table-cell table:style-name="ce11" office:value-type="float" office:value="22" calcext:value-type="float">
            <text:p>22</text:p>
          </table:table-cell>
          <table:table-cell table:style-name="ce11" office:value-type="float" office:value="307" calcext:value-type="float">
            <text:p>307</text:p>
          </table:table-cell>
          <table:table-cell table:style-name="ce21" office:value-type="string" calcext:value-type="string">
            <text:p>B-9</text:p>
          </table:table-cell>
          <table:table-cell table:style-name="ce21" office:value-type="float" office:value="9" calcext:value-type="float">
            <text:p>9</text:p>
          </table:table-cell>
          <table:table-cell table:style-name="ce11" office:value-type="string" calcext:value-type="string">
            <text:p>モナ・リザ</text:p>
          </table:table-cell>
          <table:table-cell table:style-name="ce11" table:formula="of:=[.E23]" office:value-type="string" office:string-value="モナ・リザ" calcext:value-type="string">
            <text:p>モナ・リザ</text:p>
          </table:table-cell>
          <table:table-cell table:style-name="ce11" office:value-type="string" calcext:value-type="string">
            <text:p>もなりざ</text:p>
          </table:table-cell>
          <table:table-cell table:style-name="ce11" office:value-type="string" calcext:value-type="string">
            <text:p>知と美の革命デッキ</text:p>
          </table:table-cell>
          <table:table-cell table:style-name="ce11" table:formula="of:=VLOOKUP([.H23];[$収録番号.$A$1:$収録番号.$B$10];2;0)" office:value-type="float" office:value="11" calcext:value-type="float">
            <text:p>11</text:p>
          </table:table-cell>
          <table:table-cell table:style-name="ce11" office:value-type="string" calcext:value-type="string">
            <text:p>N</text:p>
          </table:table-cell>
          <table:table-cell table:style-name="ce11" table:formula="of:=VLOOKUP([.J2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3];[$種類番号.$A$1:$種類番号.$B$4];2;0)" office:value-type="float" office:value="2" calcext:value-type="float">
            <text:p>2</text:p>
          </table:table-cell>
          <table:table-cell table:style-name="ce11" office:value-type="string" calcext:value-type="string">
            <text:p>青</text:p>
          </table:table-cell>
          <table:table-cell table:style-name="ce11" table:formula="of:=VLOOKUP([.N2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能力語番号.$A$1:$能力語番号.$B$11];2;0);0)" office:value-type="float" office:value="0" calcext:value-type="float">
            <text:p>0</text:p>
          </table:table-cell>
          <table:table-cell office:value-type="string" calcext:value-type="string">
            <text:p>美術</text:p>
          </table:table-cell>
          <table:table-cell table:style-name="ce11" table:formula="of:=IFERROR(VLOOKUP([.$T23];[$特性番号.$A$1:$特性番号.$B$8];2;0);0)" office:value-type="float" office:value="2" calcext:value-type="float">
            <text:p>2</text:p>
          </table:table-cell>
          <table:table-cell table:style-name="ce11" office:value-type="string" calcext:value-type="string">
            <text:p>自分のメインフェイズが開始したとき、手札の「美術」カード1つを墓地に置いて発動できる。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09.png</text:p>
          </table:table-cell>
          <table:table-cell table:style-name="ce11" table:formula="of:=CONCATENATE([$JSON.$A$1];[.$C23];[$JSON.$B$1];[.$E23];[$JSON.$C$1];[.F23];[$JSON.$D$1];[.$G23];[$JSON.$E$1];IF(ISNA([.$T23]);&quot;null&quot;;&quot;&quot;&quot;&quot;&amp;[.$T23]&amp;&quot;&quot;&quot;&quot;);[$JSON.$F$1];[.$V23];[$JSON.$G$1];IF(ISNA([.$X23]);&quot;null&quot;;&quot;&quot;&quot;&quot;&amp;[.$X23]&amp;&quot;&quot;&quot;&quot;);[$JSON.$H$1];[.$AA23];[$JSON.$I$1];[.$I23];[$JSON.$J$1];[.K23];[$JSON.$K$1];[.$M23];[$JSON.$L$1];[.$P23];[$JSON.$M$1];[.$O23];[$JSON.$N$1];[.$S23];[$JSON.$O$1];[.$U23];[$JSON.$P$1];IF(ISNA([.$W23]);&quot;null&quot;;[.$W23]);[$JSON.$Q$1];[.$Y23];[$JSON.$R$1];IF([.$Z23];&quot;true&quot;;&quot;false&quot;);[$JSON.$S$1];[.$A23];[$JSON.$T$1];[.$B23];[$JSON.$U$1])" office:value-type="string" office:string-value="{&quot;id&quot;:&quot;B-9&quot;,&quot;name&quot;:&quot;モナ・リザ&quot;,&quot;displayName&quot;:&quot;モナ・リザ&quot;,&quot;kana&quot;:&quot;もなりざ&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rarity&quot;:1,&quot;type&quot;:2,&quot;level&quot;:2,&quot;color&quot;:2,&quot;term&quot;:0,&quot;trait&quot;:2,&quot;power&quot;:null,&quot;legacy&quot;:5,&quot;anyNumCopies&quot;:false,&quot;orderTable&quot;:22,&quot;orderDeck&quot;:307}," calcext:value-type="string">
            <text:p>{"id":"B-9","name":"モナ・リザ","displayName":"モナ・リザ","kana":"もなりざ","traitText":"美術","ruleText":"自分のメインフェイズが開始したとき、手札の「美術」カード1つを墓地に置いて発動できる。1ドローする。","legacyText":"手札に戻す","imageUrl":"https://one-draw.jp/ijinden/cardlist/B01/card/B_009.png","expansion":11,"rarity":1,"type":2,"level":2,"color":2,"term":0,"trait":2,"power":null,"legacy":5,"anyNumCopies":false,"orderTable":22,"orderDeck":307},</text:p>
          </table:table-cell>
          <table:table-cell table:number-columns-repeated="16356"/>
        </table:table-row>
        <table:table-row table:style-name="ro2">
          <table:table-cell table:style-name="ce11" office:value-type="float" office:value="23" calcext:value-type="float">
            <text:p>23</text:p>
          </table:table-cell>
          <table:table-cell table:style-name="ce11" office:value-type="float" office:value="319" calcext:value-type="float">
            <text:p>319</text:p>
          </table:table-cell>
          <table:table-cell table:style-name="ce21" office:value-type="string" calcext:value-type="string">
            <text:p>B-10</text:p>
          </table:table-cell>
          <table:table-cell table:style-name="ce21" office:value-type="float" office:value="10" calcext:value-type="float">
            <text:p>10</text:p>
          </table:table-cell>
          <table:table-cell table:style-name="ce11" office:value-type="string" calcext:value-type="string">
            <text:p>革命の広場</text:p>
          </table:table-cell>
          <table:table-cell table:style-name="ce11" office:value-type="string" calcext:value-type="string">
            <text:p>革命の広場 (スターター)</text:p>
          </table:table-cell>
          <table:table-cell table:style-name="ce11" office:value-type="string" calcext:value-type="string">
            <text:p>かくめいのひろば</text:p>
          </table:table-cell>
          <table:table-cell table:style-name="ce11" office:value-type="string" calcext:value-type="string">
            <text:p>知と美の革命デッキ</text:p>
          </table:table-cell>
          <table:table-cell table:style-name="ce11" table:formula="of:=VLOOKUP([.H24];[$収録番号.$A$1:$収録番号.$B$10];2;0)" office:value-type="float" office:value="11" calcext:value-type="float">
            <text:p>11</text:p>
          </table:table-cell>
          <table:table-cell table:style-name="ce11" office:value-type="string" calcext:value-type="string">
            <text:p>N</text:p>
          </table:table-cell>
          <table:table-cell table:style-name="ce11" table:formula="of:=VLOOKUP([.J2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4];[$種類番号.$A$1:$種類番号.$B$4];2;0)" office:value-type="float" office:value="2" calcext:value-type="float">
            <text:p>2</text:p>
          </table:table-cell>
          <table:table-cell table:style-name="ce11" office:value-type="string" calcext:value-type="string">
            <text:p>青</text:p>
          </table:table-cell>
          <table:table-cell table:style-name="ce11" table:formula="of:=VLOOKUP([.N2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4];[$特性番号.$A$1:$特性番号.$B$8];2;0);0)" office:value-type="float" office:value="0" calcext:value-type="float">
            <text:p>0</text:p>
          </table:table-cell>
          <table:table-cell table:style-name="ce11"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4];[$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10.png</text:p>
          </table:table-cell>
          <table:table-cell table:style-name="ce11" table:formula="of:=CONCATENATE([$JSON.$A$1];[.$C24];[$JSON.$B$1];[.$E24];[$JSON.$C$1];[.F24];[$JSON.$D$1];[.$G24];[$JSON.$E$1];IF(ISNA([.$T24]);&quot;null&quot;;&quot;&quot;&quot;&quot;&amp;[.$T24]&amp;&quot;&quot;&quot;&quot;);[$JSON.$F$1];[.$V24];[$JSON.$G$1];IF(ISNA([.$X24]);&quot;null&quot;;&quot;&quot;&quot;&quot;&amp;[.$X24]&amp;&quot;&quot;&quot;&quot;);[$JSON.$H$1];[.$AA24];[$JSON.$I$1];[.$I24];[$JSON.$J$1];[.K24];[$JSON.$K$1];[.$M24];[$JSON.$L$1];[.$P24];[$JSON.$M$1];[.$O24];[$JSON.$N$1];[.$S24];[$JSON.$O$1];[.$U24];[$JSON.$P$1];IF(ISNA([.$W24]);&quot;null&quot;;[.$W24]);[$JSON.$Q$1];[.$Y24];[$JSON.$R$1];IF([.$Z24];&quot;true&quot;;&quot;false&quot;);[$JSON.$S$1];[.$A24];[$JSON.$T$1];[.$B24];[$JSON.$U$1])" office:value-type="string" office:string-value="{&quot;id&quot;:&quot;B-10&quot;,&quot;name&quot;:&quot;革命の広場&quot;,&quot;displayName&quot;:&quot;革命の広場 (スターター)&quot;,&quot;kana&quot;:&quot;かくめいのひろば&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rarity&quot;:1,&quot;type&quot;:2,&quot;level&quot;:3,&quot;color&quot;:2,&quot;term&quot;:0,&quot;trait&quot;:0,&quot;power&quot;:null,&quot;legacy&quot;:5,&quot;anyNumCopies&quot;:false,&quot;orderTable&quot;:23,&quot;orderDeck&quot;:319}," calcext:value-type="string">
            <text:p>{"id":"B-10","name":"革命の広場","displayName":"革命の広場 (スターター)","kana":"かくめいのひろば","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rarity":1,"type":2,"level":3,"color":2,"term":0,"trait":0,"power":null,"legacy":5,"anyNumCopies":false,"orderTable":23,"orderDeck":319},</text:p>
          </table:table-cell>
          <table:table-cell table:number-columns-repeated="16356"/>
        </table:table-row>
        <table:table-row table:style-name="ro2">
          <table:table-cell table:style-name="ce11" office:value-type="float" office:value="24" calcext:value-type="float">
            <text:p>24</text:p>
          </table:table-cell>
          <table:table-cell table:style-name="ce11" office:value-type="float" office:value="389" calcext:value-type="float">
            <text:p>389</text:p>
          </table:table-cell>
          <table:table-cell table:style-name="ce21" office:value-type="string" calcext:value-type="string">
            <text:p>B-11</text:p>
          </table:table-cell>
          <table:table-cell table:style-name="ce21" office:value-type="float" office:value="11" calcext:value-type="float">
            <text:p>11</text:p>
          </table:table-cell>
          <table:table-cell table:style-name="ce11" office:value-type="string" calcext:value-type="string">
            <text:p>フリート</text:p>
          </table:table-cell>
          <table:table-cell table:style-name="ce11" table:formula="of:=[.E25]" office:value-type="string" office:string-value="フリート" calcext:value-type="string">
            <text:p>フリート</text:p>
          </table:table-cell>
          <table:table-cell table:style-name="ce11" office:value-type="string" calcext:value-type="string">
            <text:p>ふりーと</text:p>
          </table:table-cell>
          <table:table-cell table:style-name="ce11" office:value-type="string" calcext:value-type="string">
            <text:p>知と美の革命デッキ</text:p>
          </table:table-cell>
          <table:table-cell table:style-name="ce11" table:formula="of:=VLOOKUP([.H25];[$収録番号.$A$1:$収録番号.$B$10];2;0)" office:value-type="float" office:value="11" calcext:value-type="float">
            <text:p>11</text:p>
          </table:table-cell>
          <table:table-cell table:style-name="ce11" office:value-type="string" calcext:value-type="string">
            <text:p>N</text:p>
          </table:table-cell>
          <table:table-cell table:style-name="ce11" table:formula="of:=VLOOKUP([.J2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5];[$種類番号.$A$1:$種類番号.$B$4];2;0)" office:value-type="float" office:value="3" calcext:value-type="float">
            <text:p>3</text:p>
          </table:table-cell>
          <table:table-cell table:style-name="ce11" office:value-type="string" calcext:value-type="string">
            <text:p>青</text:p>
          </table:table-cell>
          <table:table-cell table:style-name="ce11" table:formula="of:=VLOOKUP([.N25];[$色番号.$A$1:$色番号.$B$10];2;0)" office:value-type="float" office:value="2" calcext:value-type="float">
            <text:p>2</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5];[$特性番号.$A$1:$特性番号.$B$8];2;0);0)" office:value-type="float" office:value="0" calcext:value-type="float">
            <text:p>0</text:p>
          </table:table-cell>
          <table:table-cell table:style-name="ce11" office:value-type="string" calcext:value-type="string">
            <text:p>このターンのバトル解決に際し、アタッカーは破壊されない。¶このターンの間「航海」を持つ戦場のイジンは「アタック+2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11.png</text:p>
          </table:table-cell>
          <table:table-cell table:style-name="ce11" table:formula="of:=CONCATENATE([$JSON.$A$1];[.$C25];[$JSON.$B$1];[.$E25];[$JSON.$C$1];[.F25];[$JSON.$D$1];[.$G25];[$JSON.$E$1];IF(ISNA([.$T25]);&quot;null&quot;;&quot;&quot;&quot;&quot;&amp;[.$T25]&amp;&quot;&quot;&quot;&quot;);[$JSON.$F$1];[.$V25];[$JSON.$G$1];IF(ISNA([.$X25]);&quot;null&quot;;&quot;&quot;&quot;&quot;&amp;[.$X25]&amp;&quot;&quot;&quot;&quot;);[$JSON.$H$1];[.$AA25];[$JSON.$I$1];[.$I25];[$JSON.$J$1];[.K25];[$JSON.$K$1];[.$M25];[$JSON.$L$1];[.$P25];[$JSON.$M$1];[.$O25];[$JSON.$N$1];[.$S25];[$JSON.$O$1];[.$U25];[$JSON.$P$1];IF(ISNA([.$W25]);&quot;null&quot;;[.$W25]);[$JSON.$Q$1];[.$Y25];[$JSON.$R$1];IF([.$Z25];&quot;true&quot;;&quot;false&quot;);[$JSON.$S$1];[.$A25];[$JSON.$T$1];[.$B25];[$JSON.$U$1])" office:value-type="string" office:string-value="{&quot;id&quot;:&quot;B-11&quot;,&quot;name&quot;:&quot;フリート&quot;,&quot;displayName&quot;:&quot;フリート&quot;,&quot;kana&quot;:&quot;ふりーと&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rarity&quot;:1,&quot;type&quot;:3,&quot;level&quot;:3,&quot;color&quot;:2,&quot;term&quot;:0,&quot;trait&quot;:0,&quot;power&quot;:null,&quot;legacy&quot;:0,&quot;anyNumCopies&quot;:false,&quot;orderTable&quot;:24,&quot;orderDeck&quot;:389}," calcext:value-type="string">
            <text:p>{"id":"B-11","name":"フリート","displayName":"フリート","kana":"ふりーと","traitText":null,"ruleText":"このターンのバトル解決に際し、アタッカーは破壊されない。¶このターンの間「航海」を持つ戦場のイジンは「アタック+2000」を得る。","legacyText":null,"imageUrl":"https://one-draw.jp/ijinden/cardlist/B01/card/B_011.png","expansion":11,"rarity":1,"type":3,"level":3,"color":2,"term":0,"trait":0,"power":null,"legacy":0,"anyNumCopies":false,"orderTable":24,"orderDeck":389},</text:p>
          </table:table-cell>
          <table:table-cell table:number-columns-repeated="16356"/>
        </table:table-row>
        <table:table-row table:style-name="ro2">
          <table:table-cell table:style-name="ce11" office:value-type="float" office:value="25" calcext:value-type="float">
            <text:p>25</text:p>
          </table:table-cell>
          <table:table-cell table:style-name="ce11" office:value-type="float" office:value="390" calcext:value-type="float">
            <text:p>390</text:p>
          </table:table-cell>
          <table:table-cell table:style-name="ce21" office:value-type="string" calcext:value-type="string">
            <text:p>B-12</text:p>
          </table:table-cell>
          <table:table-cell table:style-name="ce21" office:value-type="float" office:value="12" calcext:value-type="float">
            <text:p>12</text:p>
          </table:table-cell>
          <table:table-cell table:style-name="ce11" office:value-type="string" calcext:value-type="string">
            <text:p>ドローイング</text:p>
          </table:table-cell>
          <table:table-cell table:style-name="ce11" office:value-type="string" calcext:value-type="string">
            <text:p>ドローイング (スターター)</text:p>
          </table:table-cell>
          <table:table-cell table:style-name="ce11" office:value-type="string" calcext:value-type="string">
            <text:p>どろーいんぐ</text:p>
          </table:table-cell>
          <table:table-cell table:style-name="ce11" office:value-type="string" calcext:value-type="string">
            <text:p>知と美の革命デッキ</text:p>
          </table:table-cell>
          <table:table-cell table:style-name="ce11" table:formula="of:=VLOOKUP([.H26];[$収録番号.$A$1:$収録番号.$B$10];2;0)" office:value-type="float" office:value="11" calcext:value-type="float">
            <text:p>11</text:p>
          </table:table-cell>
          <table:table-cell table:style-name="ce11" office:value-type="string" calcext:value-type="string">
            <text:p>N</text:p>
          </table:table-cell>
          <table:table-cell table:style-name="ce11" table:formula="of:=VLOOKUP([.J2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6];[$種類番号.$A$1:$種類番号.$B$4];2;0)" office:value-type="float" office:value="3" calcext:value-type="float">
            <text:p>3</text:p>
          </table:table-cell>
          <table:table-cell table:style-name="ce11" office:value-type="string" calcext:value-type="string">
            <text:p>青</text:p>
          </table:table-cell>
          <table:table-cell table:style-name="ce11" table:formula="of:=VLOOKUP([.N26];[$色番号.$A$1:$色番号.$B$10];2;0)" office:value-type="float" office:value="2" calcext:value-type="float">
            <text:p>2</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6];[$特性番号.$A$1:$特性番号.$B$8];2;0);0)" office:value-type="float" office:value="0" calcext:value-type="float">
            <text:p>0</text:p>
          </table:table-cell>
          <table:table-cell table:style-name="ce11" office:value-type="string" calcext:value-type="string">
            <text:p>2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6];[$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B01/card/B_012.png</text:p>
          </table:table-cell>
          <table:table-cell table:style-name="ce11" table:formula="of:=CONCATENATE([$JSON.$A$1];[.$C26];[$JSON.$B$1];[.$E26];[$JSON.$C$1];[.F26];[$JSON.$D$1];[.$G26];[$JSON.$E$1];IF(ISNA([.$T26]);&quot;null&quot;;&quot;&quot;&quot;&quot;&amp;[.$T26]&amp;&quot;&quot;&quot;&quot;);[$JSON.$F$1];[.$V26];[$JSON.$G$1];IF(ISNA([.$X26]);&quot;null&quot;;&quot;&quot;&quot;&quot;&amp;[.$X26]&amp;&quot;&quot;&quot;&quot;);[$JSON.$H$1];[.$AA26];[$JSON.$I$1];[.$I26];[$JSON.$J$1];[.K26];[$JSON.$K$1];[.$M26];[$JSON.$L$1];[.$P26];[$JSON.$M$1];[.$O26];[$JSON.$N$1];[.$S26];[$JSON.$O$1];[.$U26];[$JSON.$P$1];IF(ISNA([.$W26]);&quot;null&quot;;[.$W26]);[$JSON.$Q$1];[.$Y26];[$JSON.$R$1];IF([.$Z26];&quot;true&quot;;&quot;false&quot;);[$JSON.$S$1];[.$A26];[$JSON.$T$1];[.$B26];[$JSON.$U$1])" office:value-type="string" office:string-value="{&quot;id&quot;:&quot;B-12&quot;,&quot;name&quot;:&quot;ドローイング&quot;,&quot;displayName&quot;:&quot;ドローイング (スターター)&quot;,&quot;kana&quot;:&quot;どろーいんぐ&quot;,&quot;traitText&quot;:null,&quot;ruleText&quot;:&quot;2ドローする。&quot;,&quot;legacyText&quot;:&quot;冥府発動&quot;,&quot;imageUrl&quot;:&quot;https://one-draw.jp/ijinden/cardlist/B01/card/B_012.png&quot;,&quot;expansion&quot;:11,&quot;rarity&quot;:1,&quot;type&quot;:3,&quot;level&quot;:3,&quot;color&quot;:2,&quot;term&quot;:0,&quot;trait&quot;:0,&quot;power&quot;:null,&quot;legacy&quot;:2,&quot;anyNumCopies&quot;:false,&quot;orderTable&quot;:25,&quot;orderDeck&quot;:390}," calcext:value-type="string">
            <text:p>{"id":"B-12","name":"ドローイング","displayName":"ドローイング (スターター)","kana":"どろーいんぐ","traitText":null,"ruleText":"2ドローする。","legacyText":"冥府発動","imageUrl":"https://one-draw.jp/ijinden/cardlist/B01/card/B_012.png","expansion":11,"rarity":1,"type":3,"level":3,"color":2,"term":0,"trait":0,"power":null,"legacy":2,"anyNumCopies":false,"orderTable":25,"orderDeck":390},</text:p>
          </table:table-cell>
          <table:table-cell table:number-columns-repeated="16356"/>
        </table:table-row>
        <table:table-row table:style-name="ro2">
          <table:table-cell table:style-name="ce11" office:value-type="float" office:value="26" calcext:value-type="float">
            <text:p>26</text:p>
          </table:table-cell>
          <table:table-cell table:style-name="ce11" office:value-type="float" office:value="442" calcext:value-type="float">
            <text:p>442</text:p>
          </table:table-cell>
          <table:table-cell table:style-name="ce21" office:value-type="string" calcext:value-type="string">
            <text:p>B-13</text:p>
          </table:table-cell>
          <table:table-cell table:style-name="ce21" office:value-type="float" office:value="13" calcext:value-type="float">
            <text:p>13</text:p>
          </table:table-cell>
          <table:table-cell table:style-name="ce11" office:value-type="string" calcext:value-type="string">
            <text:p>ブルーストーン</text:p>
          </table:table-cell>
          <table:table-cell table:style-name="ce11" office:value-type="string" calcext:value-type="string">
            <text:p>ブルーストーン (スターター)</text:p>
          </table:table-cell>
          <table:table-cell table:style-name="ce11" office:value-type="string" calcext:value-type="string">
            <text:p>ぶるーすとーん</text:p>
          </table:table-cell>
          <table:table-cell table:style-name="ce11" office:value-type="string" calcext:value-type="string">
            <text:p>知と美の革命デッキ</text:p>
          </table:table-cell>
          <table:table-cell table:style-name="ce11" table:formula="of:=VLOOKUP([.H27];[$収録番号.$A$1:$収録番号.$B$10];2;0)" office:value-type="float" office:value="11" calcext:value-type="float">
            <text:p>11</text:p>
          </table:table-cell>
          <table:table-cell table:style-name="ce11" office:value-type="string" calcext:value-type="string">
            <text:p>N</text:p>
          </table:table-cell>
          <table:table-cell table:style-name="ce11" table:formula="of:=VLOOKUP([.J2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7];[$種類番号.$A$1:$種類番号.$B$4];2;0)" office:value-type="float" office:value="4" calcext:value-type="float">
            <text:p>4</text:p>
          </table:table-cell>
          <table:table-cell table:style-name="ce11" office:value-type="string" calcext:value-type="string">
            <text:p>青</text:p>
          </table:table-cell>
          <table:table-cell table:style-name="ce11" table:formula="of:=VLOOKUP([.N27];[$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7];[$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7];[$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B01/card/B_013.png</text:p>
          </table:table-cell>
          <table:table-cell table:style-name="ce11" table:formula="of:=CONCATENATE([$JSON.$A$1];[.$C27];[$JSON.$B$1];[.$E27];[$JSON.$C$1];[.F27];[$JSON.$D$1];[.$G27];[$JSON.$E$1];IF(ISNA([.$T27]);&quot;null&quot;;&quot;&quot;&quot;&quot;&amp;[.$T27]&amp;&quot;&quot;&quot;&quot;);[$JSON.$F$1];[.$V27];[$JSON.$G$1];IF(ISNA([.$X27]);&quot;null&quot;;&quot;&quot;&quot;&quot;&amp;[.$X27]&amp;&quot;&quot;&quot;&quot;);[$JSON.$H$1];[.$AA27];[$JSON.$I$1];[.$I27];[$JSON.$J$1];[.K27];[$JSON.$K$1];[.$M27];[$JSON.$L$1];[.$P27];[$JSON.$M$1];[.$O27];[$JSON.$N$1];[.$S27];[$JSON.$O$1];[.$U27];[$JSON.$P$1];IF(ISNA([.$W27]);&quot;null&quot;;[.$W27]);[$JSON.$Q$1];[.$Y27];[$JSON.$R$1];IF([.$Z27];&quot;true&quot;;&quot;false&quot;);[$JSON.$S$1];[.$A27];[$JSON.$T$1];[.$B27];[$JSON.$U$1])" office:value-type="string" office:string-value="{&quot;id&quot;:&quot;B-13&quot;,&quot;name&quot;:&quot;ブルーストーン&quot;,&quot;displayName&quot;:&quot;ブルーストーン (スターター)&quot;,&quot;kana&quot;:&quot;ぶるーすとーん&quot;,&quot;traitText&quot;:null,&quot;ruleText&quot;:&quot;※デッキに何枚でも入れてよい。&quot;,&quot;legacyText&quot;:&quot;復元&quot;,&quot;imageUrl&quot;:&quot;https://one-draw.jp/ijinden/cardlist/B01/card/B_013.png&quot;,&quot;expansion&quot;:11,&quot;rarity&quot;:1,&quot;type&quot;:4,&quot;level&quot;:1,&quot;color&quot;:2,&quot;term&quot;:0,&quot;trait&quot;:0,&quot;power&quot;:null,&quot;legacy&quot;:3,&quot;anyNumCopies&quot;:true,&quot;orderTable&quot;:26,&quot;orderDeck&quot;:442}," calcext:value-type="string">
            <text:p>{"id":"B-13","name":"ブルーストーン","displayName":"ブルーストーン (スターター)","kana":"ぶるーすとーん","traitText":null,"ruleText":"※デッキに何枚でも入れてよい。","legacyText":"復元","imageUrl":"https://one-draw.jp/ijinden/cardlist/B01/card/B_013.png","expansion":11,"rarity":1,"type":4,"level":1,"color":2,"term":0,"trait":0,"power":null,"legacy":3,"anyNumCopies":true,"orderTable":26,"orderDeck":442},</text:p>
          </table:table-cell>
          <table:table-cell table:number-columns-repeated="16356"/>
        </table:table-row>
        <table:table-row table:style-name="ro2">
          <table:table-cell table:style-name="ce11" office:value-type="float" office:value="27" calcext:value-type="float">
            <text:p>27</text:p>
          </table:table-cell>
          <table:table-cell table:style-name="ce11" office:value-type="float" office:value="205" calcext:value-type="float">
            <text:p>205</text:p>
          </table:table-cell>
          <table:table-cell table:style-name="ce21" office:value-type="string" calcext:value-type="string">
            <text:p>G-1</text:p>
          </table:table-cell>
          <table:table-cell table:style-name="ce21" office:value-type="float" office:value="1" calcext:value-type="float">
            <text:p>1</text:p>
          </table:table-cell>
          <table:table-cell table:style-name="ce11" office:value-type="string" calcext:value-type="string">
            <text:p>出雲の阿国</text:p>
          </table:table-cell>
          <table:table-cell table:style-name="ce11" table:formula="of:=[.E28]" office:value-type="string" office:string-value="出雲の阿国" calcext:value-type="string">
            <text:p>出雲の阿国</text:p>
          </table:table-cell>
          <table:table-cell table:style-name="ce11" office:value-type="string" calcext:value-type="string">
            <text:p>いずものおくに</text:p>
          </table:table-cell>
          <table:table-cell table:style-name="ce11" office:value-type="string" calcext:value-type="string">
            <text:p>日本の大天才デッキ</text:p>
          </table:table-cell>
          <table:table-cell table:style-name="ce11" table:formula="of:=VLOOKUP([.H28];[$収録番号.$A$1:$収録番号.$B$10];2;0)" office:value-type="float" office:value="12" calcext:value-type="float">
            <text:p>12</text:p>
          </table:table-cell>
          <table:table-cell table:style-name="ce11" office:value-type="string" calcext:value-type="string">
            <text:p>SR</text:p>
          </table:table-cell>
          <table:table-cell table:style-name="ce11" table:formula="of:=VLOOKUP([.J2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8];[$種類番号.$A$1:$種類番号.$B$4];2;0)" office:value-type="float" office:value="1" calcext:value-type="float">
            <text:p>1</text:p>
          </table:table-cell>
          <table:table-cell table:style-name="ce11" office:value-type="string" calcext:value-type="string">
            <text:p>緑</text:p>
          </table:table-cell>
          <table:table-cell table:style-name="ce11" table:formula="of:=VLOOKUP([.N28];[$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8];[$特性番号.$A$1:$特性番号.$B$8];2;0);0)" office:value-type="float" office:value="0" calcext:value-type="float">
            <text:p>0</text:p>
          </table:table-cell>
          <table:table-cell table:style-name="ce11"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2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1.png</text:p>
          </table:table-cell>
          <table:table-cell table:style-name="ce11" table:formula="of:=CONCATENATE([$JSON.$A$1];[.$C28];[$JSON.$B$1];[.$E28];[$JSON.$C$1];[.F28];[$JSON.$D$1];[.$G28];[$JSON.$E$1];IF(ISNA([.$T28]);&quot;null&quot;;&quot;&quot;&quot;&quot;&amp;[.$T28]&amp;&quot;&quot;&quot;&quot;);[$JSON.$F$1];[.$V28];[$JSON.$G$1];IF(ISNA([.$X28]);&quot;null&quot;;&quot;&quot;&quot;&quot;&amp;[.$X28]&amp;&quot;&quot;&quot;&quot;);[$JSON.$H$1];[.$AA28];[$JSON.$I$1];[.$I28];[$JSON.$J$1];[.K28];[$JSON.$K$1];[.$M28];[$JSON.$L$1];[.$P28];[$JSON.$M$1];[.$O28];[$JSON.$N$1];[.$S28];[$JSON.$O$1];[.$U28];[$JSON.$P$1];IF(ISNA([.$W28]);&quot;null&quot;;[.$W28]);[$JSON.$Q$1];[.$Y28];[$JSON.$R$1];IF([.$Z28];&quot;true&quot;;&quot;false&quot;);[$JSON.$S$1];[.$A28];[$JSON.$T$1];[.$B28];[$JSON.$U$1])" office:value-type="string" office:string-value="{&quot;id&quot;:&quot;G-1&quot;,&quot;name&quot;:&quot;出雲の阿国&quot;,&quot;displayName&quot;:&quot;出雲の阿国&quot;,&quot;kana&quot;:&quot;いずものおくに&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rarity&quot;:4,&quot;type&quot;:1,&quot;level&quot;:5,&quot;color&quot;:4,&quot;term&quot;:0,&quot;trait&quot;:0,&quot;power&quot;:3000,&quot;legacy&quot;:4,&quot;anyNumCopies&quot;:false,&quot;orderTable&quot;:27,&quot;orderDeck&quot;:205}," calcext:value-type="string">
            <text:p>{"id":"G-1","name":"出雲の阿国","displayName":"出雲の阿国","kana":"いずものおくに","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rarity":4,"type":1,"level":5,"color":4,"term":0,"trait":0,"power":3000,"legacy":4,"anyNumCopies":false,"orderTable":27,"orderDeck":205},</text:p>
          </table:table-cell>
          <table:table-cell table:number-columns-repeated="16356"/>
        </table:table-row>
        <table:table-row table:style-name="ro2">
          <table:table-cell table:style-name="ce11" office:value-type="float" office:value="28" calcext:value-type="float">
            <text:p>28</text:p>
          </table:table-cell>
          <table:table-cell table:style-name="ce11" office:value-type="float" office:value="15" calcext:value-type="float">
            <text:p>15</text:p>
          </table:table-cell>
          <table:table-cell table:style-name="ce21" office:value-type="string" calcext:value-type="string">
            <text:p>G-2</text:p>
          </table:table-cell>
          <table:table-cell table:style-name="ce21" office:value-type="float" office:value="2" calcext:value-type="float">
            <text:p>2</text:p>
          </table:table-cell>
          <table:table-cell table:style-name="ce11" office:value-type="string" calcext:value-type="string">
            <text:p>卑弥呼</text:p>
          </table:table-cell>
          <table:table-cell table:style-name="ce11" office:value-type="string" calcext:value-type="string">
            <text:p>卑弥呼 (スターター)</text:p>
          </table:table-cell>
          <table:table-cell table:style-name="ce11" office:value-type="string" calcext:value-type="string">
            <text:p>ひみこ</text:p>
          </table:table-cell>
          <table:table-cell table:style-name="ce11" office:value-type="string" calcext:value-type="string">
            <text:p>日本の大天才デッキ</text:p>
          </table:table-cell>
          <table:table-cell table:style-name="ce11" table:formula="of:=VLOOKUP([.H29];[$収録番号.$A$1:$収録番号.$B$10];2;0)" office:value-type="float" office:value="12" calcext:value-type="float">
            <text:p>12</text:p>
          </table:table-cell>
          <table:table-cell table:style-name="ce11" office:value-type="string" calcext:value-type="string">
            <text:p>N</text:p>
          </table:table-cell>
          <table:table-cell table:style-name="ce11" table:formula="of:=VLOOKUP([.J2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9];[$種類番号.$A$1:$種類番号.$B$4];2;0)" office:value-type="float" office:value="1" calcext:value-type="float">
            <text:p>1</text:p>
          </table:table-cell>
          <table:table-cell table:style-name="ce11" office:value-type="string" calcext:value-type="string">
            <text:p>緑</text:p>
          </table:table-cell>
          <table:table-cell table:style-name="ce11" table:formula="of:=VLOOKUP([.N29];[$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9];[$特性番号.$A$1:$特性番号.$B$8];2;0);0)" office:value-type="float" office:value="0" calcext:value-type="float">
            <text:p>0</text:p>
          </table:table-cell>
          <table:table-cell table:style-name="ce11" office:value-type="string" calcext:value-type="string">
            <text:p>戦場に置かれたとき、自分の山札の上から1枚を、裏のまま魔力ゾーンに置く。</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2.png</text:p>
          </table:table-cell>
          <table:table-cell table:style-name="ce11" table:formula="of:=CONCATENATE([$JSON.$A$1];[.$C29];[$JSON.$B$1];[.$E29];[$JSON.$C$1];[.F29];[$JSON.$D$1];[.$G29];[$JSON.$E$1];IF(ISNA([.$T29]);&quot;null&quot;;&quot;&quot;&quot;&quot;&amp;[.$T29]&amp;&quot;&quot;&quot;&quot;);[$JSON.$F$1];[.$V29];[$JSON.$G$1];IF(ISNA([.$X29]);&quot;null&quot;;&quot;&quot;&quot;&quot;&amp;[.$X29]&amp;&quot;&quot;&quot;&quot;);[$JSON.$H$1];[.$AA29];[$JSON.$I$1];[.$I29];[$JSON.$J$1];[.K29];[$JSON.$K$1];[.$M29];[$JSON.$L$1];[.$P29];[$JSON.$M$1];[.$O29];[$JSON.$N$1];[.$S29];[$JSON.$O$1];[.$U29];[$JSON.$P$1];IF(ISNA([.$W29]);&quot;null&quot;;[.$W29]);[$JSON.$Q$1];[.$Y29];[$JSON.$R$1];IF([.$Z29];&quot;true&quot;;&quot;false&quot;);[$JSON.$S$1];[.$A29];[$JSON.$T$1];[.$B29];[$JSON.$U$1])" office:value-type="string" office:string-value="{&quot;id&quot;:&quot;G-2&quot;,&quot;name&quot;:&quot;卑弥呼&quot;,&quot;displayName&quot;:&quot;卑弥呼 (スターター)&quot;,&quot;kana&quot;:&quot;ひみこ&quot;,&quot;traitText&quot;:null,&quot;ruleText&quot;:&quot;戦場に置かれたとき、自分の山札の上から1枚を、裏のまま魔力ゾーンに置く。&quot;,&quot;legacyText&quot;:null,&quot;imageUrl&quot;:&quot;https://one-draw.jp/ijinden/cardlist/G01/card/G_002.png&quot;,&quot;expansion&quot;:12,&quot;rarity&quot;:1,&quot;type&quot;:1,&quot;level&quot;:1,&quot;color&quot;:4,&quot;term&quot;:0,&quot;trait&quot;:0,&quot;power&quot;:500,&quot;legacy&quot;:0,&quot;anyNumCopies&quot;:false,&quot;orderTable&quot;:28,&quot;orderDeck&quot;:15}," calcext:value-type="string">
            <text:p>{"id":"G-2","name":"卑弥呼","displayName":"卑弥呼 (スターター)","kana":"ひみこ","traitText":null,"ruleText":"戦場に置かれたとき、自分の山札の上から1枚を、裏のまま魔力ゾーンに置く。","legacyText":null,"imageUrl":"https://one-draw.jp/ijinden/cardlist/G01/card/G_002.png","expansion":12,"rarity":1,"type":1,"level":1,"color":4,"term":0,"trait":0,"power":500,"legacy":0,"anyNumCopies":false,"orderTable":28,"orderDeck":15},</text:p>
          </table:table-cell>
          <table:table-cell table:number-columns-repeated="16356"/>
        </table:table-row>
        <table:table-row table:style-name="ro2">
          <table:table-cell table:style-name="ce11" office:value-type="float" office:value="29" calcext:value-type="float">
            <text:p>29</text:p>
          </table:table-cell>
          <table:table-cell table:style-name="ce11" office:value-type="float" office:value="107" calcext:value-type="float">
            <text:p>107</text:p>
          </table:table-cell>
          <table:table-cell table:style-name="ce21" office:value-type="string" calcext:value-type="string">
            <text:p>G-3</text:p>
          </table:table-cell>
          <table:table-cell table:style-name="ce21" office:value-type="float" office:value="3" calcext:value-type="float">
            <text:p>3</text:p>
          </table:table-cell>
          <table:table-cell table:style-name="ce11" office:value-type="string" calcext:value-type="string">
            <text:p>アテルイ</text:p>
          </table:table-cell>
          <table:table-cell table:style-name="ce11" table:formula="of:=[.E30]" office:value-type="string" office:string-value="アテルイ" calcext:value-type="string">
            <text:p>アテルイ</text:p>
          </table:table-cell>
          <table:table-cell table:style-name="ce11" office:value-type="string" calcext:value-type="string">
            <text:p>あてるい</text:p>
          </table:table-cell>
          <table:table-cell table:style-name="ce11" office:value-type="string" calcext:value-type="string">
            <text:p>日本の大天才デッキ</text:p>
          </table:table-cell>
          <table:table-cell table:style-name="ce11" table:formula="of:=VLOOKUP([.H30];[$収録番号.$A$1:$収録番号.$B$10];2;0)" office:value-type="float" office:value="12" calcext:value-type="float">
            <text:p>12</text:p>
          </table:table-cell>
          <table:table-cell table:style-name="ce11" office:value-type="string" calcext:value-type="string">
            <text:p>N</text:p>
          </table:table-cell>
          <table:table-cell table:style-name="ce11" table:formula="of:=VLOOKUP([.J3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0];[$種類番号.$A$1:$種類番号.$B$4];2;0)" office:value-type="float" office:value="1" calcext:value-type="float">
            <text:p>1</text:p>
          </table:table-cell>
          <table:table-cell table:style-name="ce11" office:value-type="string" calcext:value-type="string">
            <text:p>緑</text:p>
          </table:table-cell>
          <table:table-cell table:style-name="ce11" table:formula="of:=VLOOKUP([.N3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0];[$特性番号.$A$1:$特性番号.$B$8];2;0);0)" office:value-type="float" office:value="0" calcext:value-type="float">
            <text:p>0</text:p>
          </table:table-cell>
          <table:table-cell table:style-name="ce11" office:value-type="string" calcext:value-type="string">
            <text:p>「剣術」イジンが戦場に置かれたとき、これを起こす。¶アタック+1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3.png</text:p>
          </table:table-cell>
          <table:table-cell table:style-name="ce11" table:formula="of:=CONCATENATE([$JSON.$A$1];[.$C30];[$JSON.$B$1];[.$E30];[$JSON.$C$1];[.F30];[$JSON.$D$1];[.$G30];[$JSON.$E$1];IF(ISNA([.$T30]);&quot;null&quot;;&quot;&quot;&quot;&quot;&amp;[.$T30]&amp;&quot;&quot;&quot;&quot;);[$JSON.$F$1];[.$V30];[$JSON.$G$1];IF(ISNA([.$X30]);&quot;null&quot;;&quot;&quot;&quot;&quot;&amp;[.$X30]&amp;&quot;&quot;&quot;&quot;);[$JSON.$H$1];[.$AA30];[$JSON.$I$1];[.$I30];[$JSON.$J$1];[.K30];[$JSON.$K$1];[.$M30];[$JSON.$L$1];[.$P30];[$JSON.$M$1];[.$O30];[$JSON.$N$1];[.$S30];[$JSON.$O$1];[.$U30];[$JSON.$P$1];IF(ISNA([.$W30]);&quot;null&quot;;[.$W30]);[$JSON.$Q$1];[.$Y30];[$JSON.$R$1];IF([.$Z30];&quot;true&quot;;&quot;false&quot;);[$JSON.$S$1];[.$A30];[$JSON.$T$1];[.$B30];[$JSON.$U$1])" office:value-type="string" office:string-value="{&quot;id&quot;:&quot;G-3&quot;,&quot;name&quot;:&quot;アテルイ&quot;,&quot;displayName&quot;:&quot;アテルイ&quot;,&quot;kana&quot;:&quot;あてるい&quot;,&quot;traitText&quot;:null,&quot;ruleText&quot;:&quot;「剣術」イジンが戦場に置かれたとき、これを起こす。¶アタック+1000&quot;,&quot;legacyText&quot;:&quot;1ドローする&quot;,&quot;imageUrl&quot;:&quot;https://one-draw.jp/ijinden/cardlist/G01/card/G_003.png&quot;,&quot;expansion&quot;:12,&quot;rarity&quot;:1,&quot;type&quot;:1,&quot;level&quot;:3,&quot;color&quot;:4,&quot;term&quot;:0,&quot;trait&quot;:0,&quot;power&quot;:2000,&quot;legacy&quot;:4,&quot;anyNumCopies&quot;:false,&quot;orderTable&quot;:29,&quot;orderDeck&quot;:107}," calcext:value-type="string">
            <text:p>{"id":"G-3","name":"アテルイ","displayName":"アテルイ","kana":"あてるい","traitText":null,"ruleText":"「剣術」イジンが戦場に置かれたとき、これを起こす。¶アタック+1000","legacyText":"1ドローする","imageUrl":"https://one-draw.jp/ijinden/cardlist/G01/card/G_003.png","expansion":12,"rarity":1,"type":1,"level":3,"color":4,"term":0,"trait":0,"power":2000,"legacy":4,"anyNumCopies":false,"orderTable":29,"orderDeck":107},</text:p>
          </table:table-cell>
          <table:table-cell table:number-columns-repeated="16356"/>
        </table:table-row>
        <table:table-row table:style-name="ro2">
          <table:table-cell table:style-name="ce11" office:value-type="float" office:value="30" calcext:value-type="float">
            <text:p>30</text:p>
          </table:table-cell>
          <table:table-cell table:style-name="ce11" office:value-type="float" office:value="56" calcext:value-type="float">
            <text:p>56</text:p>
          </table:table-cell>
          <table:table-cell table:style-name="ce21" office:value-type="string" calcext:value-type="string">
            <text:p>G-4</text:p>
          </table:table-cell>
          <table:table-cell table:style-name="ce21" office:value-type="float" office:value="4" calcext:value-type="float">
            <text:p>4</text:p>
          </table:table-cell>
          <table:table-cell table:style-name="ce11" office:value-type="string" calcext:value-type="string">
            <text:p>紀貫之</text:p>
          </table:table-cell>
          <table:table-cell table:style-name="ce11" table:formula="of:=[.E31]" office:value-type="string" office:string-value="紀貫之" calcext:value-type="string">
            <text:p>紀貫之</text:p>
          </table:table-cell>
          <table:table-cell table:style-name="ce11" office:value-type="string" calcext:value-type="string">
            <text:p>きのつらゆき</text:p>
          </table:table-cell>
          <table:table-cell table:style-name="ce11" office:value-type="string" calcext:value-type="string">
            <text:p>日本の大天才デッキ</text:p>
          </table:table-cell>
          <table:table-cell table:style-name="ce11" table:formula="of:=VLOOKUP([.H31];[$収録番号.$A$1:$収録番号.$B$10];2;0)" office:value-type="float" office:value="12" calcext:value-type="float">
            <text:p>12</text:p>
          </table:table-cell>
          <table:table-cell table:style-name="ce11" office:value-type="string" calcext:value-type="string">
            <text:p>N</text:p>
          </table:table-cell>
          <table:table-cell table:style-name="ce11" table:formula="of:=VLOOKUP([.J3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1];[$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1];[$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31];[$特性番号.$A$1:$特性番号.$B$8];2;0);0)" office:value-type="float" office:value="0" calcext:value-type="float">
            <text:p>0</text:p>
          </table:table-cell>
          <table:table-cell table:style-name="ce11" office:value-type="string" calcext:value-type="string">
            <text:p>執筆 - ハイケイが戦場に置かれたとき、これを裏にして魔力ゾーン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4.png</text:p>
          </table:table-cell>
          <table:table-cell table:style-name="ce11" table:formula="of:=CONCATENATE([$JSON.$A$1];[.$C31];[$JSON.$B$1];[.$E31];[$JSON.$C$1];[.F31];[$JSON.$D$1];[.$G31];[$JSON.$E$1];IF(ISNA([.$T31]);&quot;null&quot;;&quot;&quot;&quot;&quot;&amp;[.$T31]&amp;&quot;&quot;&quot;&quot;);[$JSON.$F$1];[.$V31];[$JSON.$G$1];IF(ISNA([.$X31]);&quot;null&quot;;&quot;&quot;&quot;&quot;&amp;[.$X31]&amp;&quot;&quot;&quot;&quot;);[$JSON.$H$1];[.$AA31];[$JSON.$I$1];[.$I31];[$JSON.$J$1];[.K31];[$JSON.$K$1];[.$M31];[$JSON.$L$1];[.$P31];[$JSON.$M$1];[.$O31];[$JSON.$N$1];[.$S31];[$JSON.$O$1];[.$U31];[$JSON.$P$1];IF(ISNA([.$W31]);&quot;null&quot;;[.$W31]);[$JSON.$Q$1];[.$Y31];[$JSON.$R$1];IF([.$Z31];&quot;true&quot;;&quot;false&quot;);[$JSON.$S$1];[.$A31];[$JSON.$T$1];[.$B31];[$JSON.$U$1])" office:value-type="string" office:string-value="{&quot;id&quot;:&quot;G-4&quot;,&quot;name&quot;:&quot;紀貫之&quot;,&quot;displayName&quot;:&quot;紀貫之&quot;,&quot;kana&quot;:&quot;きのつらゆき&quot;,&quot;traitText&quot;:null,&quot;ruleText&quot;:&quot;執筆 - ハイケイが戦場に置かれたとき、これを裏にして魔力ゾーンに置く。&quot;,&quot;legacyText&quot;:&quot;1ドローする&quot;,&quot;imageUrl&quot;:&quot;https://one-draw.jp/ijinden/cardlist/G01/card/G_004.png&quot;,&quot;expansion&quot;:12,&quot;rarity&quot;:1,&quot;type&quot;:1,&quot;level&quot;:2,&quot;color&quot;:4,&quot;term&quot;:2,&quot;trait&quot;:0,&quot;power&quot;:2000,&quot;legacy&quot;:4,&quot;anyNumCopies&quot;:false,&quot;orderTable&quot;:30,&quot;orderDeck&quot;:56}," calcext:value-type="string">
            <text:p>{"id":"G-4","name":"紀貫之","displayName":"紀貫之","kana":"きのつらゆき","traitText":null,"ruleText":"執筆 - ハイケイが戦場に置かれたとき、これを裏にして魔力ゾーンに置く。","legacyText":"1ドローする","imageUrl":"https://one-draw.jp/ijinden/cardlist/G01/card/G_004.png","expansion":12,"rarity":1,"type":1,"level":2,"color":4,"term":2,"trait":0,"power":2000,"legacy":4,"anyNumCopies":false,"orderTable":30,"orderDeck":56},</text:p>
          </table:table-cell>
          <table:table-cell table:number-columns-repeated="16356"/>
        </table:table-row>
        <table:table-row table:style-name="ro2">
          <table:table-cell table:style-name="ce11" office:value-type="float" office:value="31" calcext:value-type="float">
            <text:p>31</text:p>
          </table:table-cell>
          <table:table-cell table:style-name="ce11" office:value-type="float" office:value="155" calcext:value-type="float">
            <text:p>155</text:p>
          </table:table-cell>
          <table:table-cell table:style-name="ce21" office:value-type="string" calcext:value-type="string">
            <text:p>G-5</text:p>
          </table:table-cell>
          <table:table-cell table:style-name="ce21" office:value-type="float" office:value="5" calcext:value-type="float">
            <text:p>5</text:p>
          </table:table-cell>
          <table:table-cell table:style-name="ce11" office:value-type="string" calcext:value-type="string">
            <text:p>阿倍仲麻呂</text:p>
          </table:table-cell>
          <table:table-cell table:style-name="ce11" table:formula="of:=[.E32]" office:value-type="string" office:string-value="阿倍仲麻呂" calcext:value-type="string">
            <text:p>阿倍仲麻呂</text:p>
          </table:table-cell>
          <table:table-cell table:style-name="ce11" office:value-type="string" calcext:value-type="string">
            <text:p>あべのなかまろ</text:p>
          </table:table-cell>
          <table:table-cell table:style-name="ce11" office:value-type="string" calcext:value-type="string">
            <text:p>日本の大天才デッキ</text:p>
          </table:table-cell>
          <table:table-cell table:style-name="ce11" table:formula="of:=VLOOKUP([.H32];[$収録番号.$A$1:$収録番号.$B$10];2;0)" office:value-type="float" office:value="12" calcext:value-type="float">
            <text:p>12</text:p>
          </table:table-cell>
          <table:table-cell table:style-name="ce11" office:value-type="string" calcext:value-type="string">
            <text:p>N</text:p>
          </table:table-cell>
          <table:table-cell table:style-name="ce11" table:formula="of:=VLOOKUP([.J3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種類番号.$A$1:$種類番号.$B$4];2;0)" office:value-type="float" office:value="1" calcext:value-type="float">
            <text:p>1</text:p>
          </table:table-cell>
          <table:table-cell table:style-name="ce11" office:value-type="string" calcext:value-type="string">
            <text:p>緑</text:p>
          </table:table-cell>
          <table:table-cell table:style-name="ce11" table:formula="of:=VLOOKUP([.N32];[$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2];[$特性番号.$A$1:$特性番号.$B$8];2;0);0)" office:value-type="float" office:value="0" calcext:value-type="float">
            <text:p>0</text:p>
          </table:table-cell>
          <table:table-cell table:style-name="ce11" office:value-type="string" calcext:value-type="string">
            <text:p>「航海」が発動したとき、1ドローして、これを起こ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5.png</text:p>
          </table:table-cell>
          <table:table-cell table:style-name="ce11" table:formula="of:=CONCATENATE([$JSON.$A$1];[.$C32];[$JSON.$B$1];[.$E32];[$JSON.$C$1];[.F32];[$JSON.$D$1];[.$G32];[$JSON.$E$1];IF(ISNA([.$T32]);&quot;null&quot;;&quot;&quot;&quot;&quot;&amp;[.$T32]&amp;&quot;&quot;&quot;&quot;);[$JSON.$F$1];[.$V32];[$JSON.$G$1];IF(ISNA([.$X32]);&quot;null&quot;;&quot;&quot;&quot;&quot;&amp;[.$X32]&amp;&quot;&quot;&quot;&quot;);[$JSON.$H$1];[.$AA32];[$JSON.$I$1];[.$I32];[$JSON.$J$1];[.K32];[$JSON.$K$1];[.$M32];[$JSON.$L$1];[.$P32];[$JSON.$M$1];[.$O32];[$JSON.$N$1];[.$S32];[$JSON.$O$1];[.$U32];[$JSON.$P$1];IF(ISNA([.$W32]);&quot;null&quot;;[.$W32]);[$JSON.$Q$1];[.$Y32];[$JSON.$R$1];IF([.$Z32];&quot;true&quot;;&quot;false&quot;);[$JSON.$S$1];[.$A32];[$JSON.$T$1];[.$B32];[$JSON.$U$1])" office:value-type="string" office:string-value="{&quot;id&quot;:&quot;G-5&quot;,&quot;name&quot;:&quot;阿倍仲麻呂&quot;,&quot;displayName&quot;:&quot;阿倍仲麻呂&quot;,&quot;kana&quot;:&quot;あべのなかまろ&quot;,&quot;traitText&quot;:null,&quot;ruleText&quot;:&quot;「航海」が発動したとき、1ドローして、これを起こす。&quot;,&quot;legacyText&quot;:null,&quot;imageUrl&quot;:&quot;https://one-draw.jp/ijinden/cardlist/G01/card/G_005.png&quot;,&quot;expansion&quot;:12,&quot;rarity&quot;:1,&quot;type&quot;:1,&quot;level&quot;:4,&quot;color&quot;:4,&quot;term&quot;:0,&quot;trait&quot;:0,&quot;power&quot;:4000,&quot;legacy&quot;:0,&quot;anyNumCopies&quot;:false,&quot;orderTable&quot;:31,&quot;orderDeck&quot;:155}," calcext:value-type="string">
            <text:p>{"id":"G-5","name":"阿倍仲麻呂","displayName":"阿倍仲麻呂","kana":"あべのなかまろ","traitText":null,"ruleText":"「航海」が発動したとき、1ドローして、これを起こす。","legacyText":null,"imageUrl":"https://one-draw.jp/ijinden/cardlist/G01/card/G_005.png","expansion":12,"rarity":1,"type":1,"level":4,"color":4,"term":0,"trait":0,"power":4000,"legacy":0,"anyNumCopies":false,"orderTable":31,"orderDeck":155},</text:p>
          </table:table-cell>
          <table:table-cell table:number-columns-repeated="16356"/>
        </table:table-row>
        <table:table-row table:style-name="ro2">
          <table:table-cell table:style-name="ce11" office:value-type="float" office:value="32" calcext:value-type="float">
            <text:p>32</text:p>
          </table:table-cell>
          <table:table-cell table:style-name="ce11" office:value-type="float" office:value="108" calcext:value-type="float">
            <text:p>108</text:p>
          </table:table-cell>
          <table:table-cell table:style-name="ce21" office:value-type="string" calcext:value-type="string">
            <text:p>G-6</text:p>
          </table:table-cell>
          <table:table-cell table:style-name="ce21" office:value-type="float" office:value="6" calcext:value-type="float">
            <text:p>6</text:p>
          </table:table-cell>
          <table:table-cell table:style-name="ce11" office:value-type="string" calcext:value-type="string">
            <text:p>葛飾北斎</text:p>
          </table:table-cell>
          <table:table-cell table:style-name="ce11" table:formula="of:=[.E33]" office:value-type="string" office:string-value="葛飾北斎" calcext:value-type="string">
            <text:p>葛飾北斎</text:p>
          </table:table-cell>
          <table:table-cell table:style-name="ce11" office:value-type="string" calcext:value-type="string">
            <text:p>かつしかほくさい</text:p>
          </table:table-cell>
          <table:table-cell table:style-name="ce11" office:value-type="string" calcext:value-type="string">
            <text:p>日本の大天才デッキ</text:p>
          </table:table-cell>
          <table:table-cell table:style-name="ce11" table:formula="of:=VLOOKUP([.H33];[$収録番号.$A$1:$収録番号.$B$10];2;0)" office:value-type="float" office:value="12" calcext:value-type="float">
            <text:p>12</text:p>
          </table:table-cell>
          <table:table-cell table:style-name="ce11" office:value-type="string" calcext:value-type="string">
            <text:p>N</text:p>
          </table:table-cell>
          <table:table-cell table:style-name="ce11" table:formula="of:=VLOOKUP([.J3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能力語番号.$A$1:$能力語番号.$B$11];2;0);0)" office:value-type="float" office:value="0" calcext:value-type="float">
            <text:p>0</text:p>
          </table:table-cell>
          <table:table-cell office:value-type="string" calcext:value-type="string">
            <text:p>美術</text:p>
          </table:table-cell>
          <table:table-cell table:style-name="ce11" table:formula="of:=IFERROR(VLOOKUP([.$T33];[$特性番号.$A$1:$特性番号.$B$8];2;0);0)" office:value-type="float" office:value="2" calcext:value-type="float">
            <text:p>2</text:p>
          </table:table-cell>
          <table:table-cell table:style-name="ce11" office:value-type="string" calcext:value-type="string">
            <text:p>戦場に置かれたとき、自分の墓地のハイケイ1つか2つを指定して発動できる。それらのハイケイすべてを手札に戻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6.png</text:p>
          </table:table-cell>
          <table:table-cell table:style-name="ce11" table:formula="of:=CONCATENATE([$JSON.$A$1];[.$C33];[$JSON.$B$1];[.$E33];[$JSON.$C$1];[.F33];[$JSON.$D$1];[.$G33];[$JSON.$E$1];IF(ISNA([.$T33]);&quot;null&quot;;&quot;&quot;&quot;&quot;&amp;[.$T33]&amp;&quot;&quot;&quot;&quot;);[$JSON.$F$1];[.$V33];[$JSON.$G$1];IF(ISNA([.$X33]);&quot;null&quot;;&quot;&quot;&quot;&quot;&amp;[.$X33]&amp;&quot;&quot;&quot;&quot;);[$JSON.$H$1];[.$AA33];[$JSON.$I$1];[.$I33];[$JSON.$J$1];[.K33];[$JSON.$K$1];[.$M33];[$JSON.$L$1];[.$P33];[$JSON.$M$1];[.$O33];[$JSON.$N$1];[.$S33];[$JSON.$O$1];[.$U33];[$JSON.$P$1];IF(ISNA([.$W33]);&quot;null&quot;;[.$W33]);[$JSON.$Q$1];[.$Y33];[$JSON.$R$1];IF([.$Z33];&quot;true&quot;;&quot;false&quot;);[$JSON.$S$1];[.$A33];[$JSON.$T$1];[.$B33];[$JSON.$U$1])" office:value-type="string" office:string-value="{&quot;id&quot;:&quot;G-6&quot;,&quot;name&quot;:&quot;葛飾北斎&quot;,&quot;displayName&quot;:&quot;葛飾北斎&quot;,&quot;kana&quot;:&quot;かつしかほくさい&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rarity&quot;:1,&quot;type&quot;:1,&quot;level&quot;:3,&quot;color&quot;:4,&quot;term&quot;:0,&quot;trait&quot;:2,&quot;power&quot;:2000,&quot;legacy&quot;:4,&quot;anyNumCopies&quot;:false,&quot;orderTable&quot;:32,&quot;orderDeck&quot;:108}," calcext:value-type="string">
            <text:p>{"id":"G-6","name":"葛飾北斎","displayName":"葛飾北斎","kana":"かつしかほくさい","traitText":"美術","ruleText":"戦場に置かれたとき、自分の墓地のハイケイ1つか2つを指定して発動できる。それらのハイケイすべてを手札に戻す。","legacyText":"1ドローする","imageUrl":"https://one-draw.jp/ijinden/cardlist/G01/card/G_006.png","expansion":12,"rarity":1,"type":1,"level":3,"color":4,"term":0,"trait":2,"power":2000,"legacy":4,"anyNumCopies":false,"orderTable":32,"orderDeck":108},</text:p>
          </table:table-cell>
          <table:table-cell table:number-columns-repeated="16356"/>
        </table:table-row>
        <table:table-row table:style-name="ro2">
          <table:table-cell table:style-name="ce11" office:value-type="float" office:value="33" calcext:value-type="float">
            <text:p>33</text:p>
          </table:table-cell>
          <table:table-cell table:style-name="ce11" office:value-type="float" office:value="156" calcext:value-type="float">
            <text:p>156</text:p>
          </table:table-cell>
          <table:table-cell table:style-name="ce21" office:value-type="string" calcext:value-type="string">
            <text:p>G-7</text:p>
          </table:table-cell>
          <table:table-cell table:style-name="ce21" office:value-type="float" office:value="7" calcext:value-type="float">
            <text:p>7</text:p>
          </table:table-cell>
          <table:table-cell table:style-name="ce11" office:value-type="string" calcext:value-type="string">
            <text:p>藤原定家</text:p>
          </table:table-cell>
          <table:table-cell table:style-name="ce11" table:formula="of:=[.E34]" office:value-type="string" office:string-value="藤原定家" calcext:value-type="string">
            <text:p>藤原定家</text:p>
          </table:table-cell>
          <table:table-cell table:style-name="ce11" office:value-type="string" calcext:value-type="string">
            <text:p>ふじわらのていか</text:p>
          </table:table-cell>
          <table:table-cell table:style-name="ce11" office:value-type="string" calcext:value-type="string">
            <text:p>日本の大天才デッキ</text:p>
          </table:table-cell>
          <table:table-cell table:style-name="ce11" table:formula="of:=VLOOKUP([.H34];[$収録番号.$A$1:$収録番号.$B$10];2;0)" office:value-type="float" office:value="12" calcext:value-type="float">
            <text:p>12</text:p>
          </table:table-cell>
          <table:table-cell table:style-name="ce11" office:value-type="string" calcext:value-type="string">
            <text:p>N</text:p>
          </table:table-cell>
          <table:table-cell table:style-name="ce11" table:formula="of:=VLOOKUP([.J3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34];[$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34];[$特性番号.$A$1:$特性番号.$B$8];2;0);0)" office:value-type="float" office:value="0" calcext:value-type="float">
            <text:p>0</text:p>
          </table:table-cell>
          <table:table-cell table:style-name="ce11" office:value-type="string" calcext:value-type="string">
            <text:p>執筆 - ハイケイが戦場に置かれたとき、自分の戦場のカードすべてを起こ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7.png</text:p>
          </table:table-cell>
          <table:table-cell table:style-name="ce11" table:formula="of:=CONCATENATE([$JSON.$A$1];[.$C34];[$JSON.$B$1];[.$E34];[$JSON.$C$1];[.F34];[$JSON.$D$1];[.$G34];[$JSON.$E$1];IF(ISNA([.$T34]);&quot;null&quot;;&quot;&quot;&quot;&quot;&amp;[.$T34]&amp;&quot;&quot;&quot;&quot;);[$JSON.$F$1];[.$V34];[$JSON.$G$1];IF(ISNA([.$X34]);&quot;null&quot;;&quot;&quot;&quot;&quot;&amp;[.$X34]&amp;&quot;&quot;&quot;&quot;);[$JSON.$H$1];[.$AA34];[$JSON.$I$1];[.$I34];[$JSON.$J$1];[.K34];[$JSON.$K$1];[.$M34];[$JSON.$L$1];[.$P34];[$JSON.$M$1];[.$O34];[$JSON.$N$1];[.$S34];[$JSON.$O$1];[.$U34];[$JSON.$P$1];IF(ISNA([.$W34]);&quot;null&quot;;[.$W34]);[$JSON.$Q$1];[.$Y34];[$JSON.$R$1];IF([.$Z34];&quot;true&quot;;&quot;false&quot;);[$JSON.$S$1];[.$A34];[$JSON.$T$1];[.$B34];[$JSON.$U$1])" office:value-type="string" office:string-value="{&quot;id&quot;:&quot;G-7&quot;,&quot;name&quot;:&quot;藤原定家&quot;,&quot;displayName&quot;:&quot;藤原定家&quot;,&quot;kana&quot;:&quot;ふじわらのていか&quot;,&quot;traitText&quot;:null,&quot;ruleText&quot;:&quot;執筆 - ハイケイが戦場に置かれたとき、自分の戦場のカードすべてを起こす。&quot;,&quot;legacyText&quot;:null,&quot;imageUrl&quot;:&quot;https://one-draw.jp/ijinden/cardlist/G01/card/G_007.png&quot;,&quot;expansion&quot;:12,&quot;rarity&quot;:1,&quot;type&quot;:1,&quot;level&quot;:4,&quot;color&quot;:4,&quot;term&quot;:2,&quot;trait&quot;:0,&quot;power&quot;:4000,&quot;legacy&quot;:0,&quot;anyNumCopies&quot;:false,&quot;orderTable&quot;:33,&quot;orderDeck&quot;:156}," calcext:value-type="string">
            <text:p>{"id":"G-7","name":"藤原定家","displayName":"藤原定家","kana":"ふじわらのていか","traitText":null,"ruleText":"執筆 - ハイケイが戦場に置かれたとき、自分の戦場のカードすべてを起こす。","legacyText":null,"imageUrl":"https://one-draw.jp/ijinden/cardlist/G01/card/G_007.png","expansion":12,"rarity":1,"type":1,"level":4,"color":4,"term":2,"trait":0,"power":4000,"legacy":0,"anyNumCopies":false,"orderTable":33,"orderDeck":156},</text:p>
          </table:table-cell>
          <table:table-cell table:number-columns-repeated="16356"/>
        </table:table-row>
        <table:table-row table:style-name="ro2">
          <table:table-cell table:style-name="ce11" office:value-type="float" office:value="34" calcext:value-type="float">
            <text:p>34</text:p>
          </table:table-cell>
          <table:table-cell table:style-name="ce11" office:value-type="float" office:value="281" calcext:value-type="float">
            <text:p>281</text:p>
          </table:table-cell>
          <table:table-cell table:style-name="ce21" office:value-type="string" calcext:value-type="string">
            <text:p>G-8</text:p>
          </table:table-cell>
          <table:table-cell table:style-name="ce21" office:value-type="float" office:value="8" calcext:value-type="float">
            <text:p>8</text:p>
          </table:table-cell>
          <table:table-cell table:style-name="ce11" office:value-type="string" calcext:value-type="string">
            <text:p>最澄</text:p>
          </table:table-cell>
          <table:table-cell table:style-name="ce11" office:value-type="string" calcext:value-type="string">
            <text:p>最澄 (スターター)</text:p>
          </table:table-cell>
          <table:table-cell table:style-name="ce11" office:value-type="string" calcext:value-type="string">
            <text:p>さいちょう</text:p>
          </table:table-cell>
          <table:table-cell table:style-name="ce11" office:value-type="string" calcext:value-type="string">
            <text:p>日本の大天才デッキ</text:p>
          </table:table-cell>
          <table:table-cell table:style-name="ce11" table:formula="of:=VLOOKUP([.H35];[$収録番号.$A$1:$収録番号.$B$10];2;0)" office:value-type="float" office:value="12" calcext:value-type="float">
            <text:p>12</text:p>
          </table:table-cell>
          <table:table-cell table:style-name="ce11" office:value-type="string" calcext:value-type="string">
            <text:p>N</text:p>
          </table:table-cell>
          <table:table-cell table:style-name="ce11" table:formula="of:=VLOOKUP([.J3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5];[$色番号.$A$1:$色番号.$B$10];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5];[$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35];[$特性番号.$A$1:$特性番号.$B$8];2;0);0)" office:value-type="float" office:value="0" calcext:value-type="float">
            <text:p>0</text:p>
          </table:table-cell>
          <table:table-cell table:style-name="ce11"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table:style-name="ce11" office:value-type="float" office:value="7000" calcext:value-type="float">
            <text:p>7000</text:p>
          </table:table-cell>
          <table:table-cell table:style-name="ce25" office:value-type="string" calcext:value-type="string">
            <text:p>魔力化</text:p>
          </table:table-cell>
          <table:table-cell table:style-name="ce11" table:formula="of:=IFERROR(VLOOKUP([.$X3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8.png</text:p>
          </table:table-cell>
          <table:table-cell table:style-name="ce11" table:formula="of:=CONCATENATE([$JSON.$A$1];[.$C35];[$JSON.$B$1];[.$E35];[$JSON.$C$1];[.F35];[$JSON.$D$1];[.$G35];[$JSON.$E$1];IF(ISNA([.$T35]);&quot;null&quot;;&quot;&quot;&quot;&quot;&amp;[.$T35]&amp;&quot;&quot;&quot;&quot;);[$JSON.$F$1];[.$V35];[$JSON.$G$1];IF(ISNA([.$X35]);&quot;null&quot;;&quot;&quot;&quot;&quot;&amp;[.$X35]&amp;&quot;&quot;&quot;&quot;);[$JSON.$H$1];[.$AA35];[$JSON.$I$1];[.$I35];[$JSON.$J$1];[.K35];[$JSON.$K$1];[.$M35];[$JSON.$L$1];[.$P35];[$JSON.$M$1];[.$O35];[$JSON.$N$1];[.$S35];[$JSON.$O$1];[.$U35];[$JSON.$P$1];IF(ISNA([.$W35]);&quot;null&quot;;[.$W35]);[$JSON.$Q$1];[.$Y35];[$JSON.$R$1];IF([.$Z35];&quot;true&quot;;&quot;false&quot;);[$JSON.$S$1];[.$A35];[$JSON.$T$1];[.$B35];[$JSON.$U$1])" office:value-type="string" office:string-value="{&quot;id&quot;:&quot;G-8&quot;,&quot;name&quot;:&quot;最澄&quot;,&quot;displayName&quot;:&quot;最澄 (スターター)&quot;,&quot;kana&quot;:&quot;さいちょう&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rarity&quot;:1,&quot;type&quot;:1,&quot;level&quot;:8,&quot;color&quot;:4,&quot;term&quot;:1,&quot;trait&quot;:0,&quot;power&quot;:7000,&quot;legacy&quot;:1,&quot;anyNumCopies&quot;:false,&quot;orderTable&quot;:34,&quot;orderDeck&quot;:281}," calcext:value-type="string">
            <text:p>{"id":"G-8","name":"最澄","displayName":"最澄 (スターター)","kana":"さいちょう","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rarity":1,"type":1,"level":8,"color":4,"term":1,"trait":0,"power":7000,"legacy":1,"anyNumCopies":false,"orderTable":34,"orderDeck":281},</text:p>
          </table:table-cell>
          <table:table-cell table:number-columns-repeated="16356"/>
        </table:table-row>
        <table:table-row table:style-name="ro2">
          <table:table-cell table:style-name="ce11" office:value-type="float" office:value="35" calcext:value-type="float">
            <text:p>35</text:p>
          </table:table-cell>
          <table:table-cell table:style-name="ce11" office:value-type="float" office:value="336" calcext:value-type="float">
            <text:p>336</text:p>
          </table:table-cell>
          <table:table-cell table:style-name="ce21" office:value-type="string" calcext:value-type="string">
            <text:p>G-9</text:p>
          </table:table-cell>
          <table:table-cell table:style-name="ce21" office:value-type="float" office:value="9" calcext:value-type="float">
            <text:p>9</text:p>
          </table:table-cell>
          <table:table-cell table:style-name="ce11" office:value-type="string" calcext:value-type="string">
            <text:p>阿弥陀堂</text:p>
          </table:table-cell>
          <table:table-cell table:style-name="ce11" table:formula="of:=[.E36]" office:value-type="string" office:string-value="阿弥陀堂" calcext:value-type="string">
            <text:p>阿弥陀堂</text:p>
          </table:table-cell>
          <table:table-cell table:style-name="ce11" office:value-type="string" calcext:value-type="string">
            <text:p>あみだどう</text:p>
          </table:table-cell>
          <table:table-cell table:style-name="ce11" office:value-type="string" calcext:value-type="string">
            <text:p>日本の大天才デッキ</text:p>
          </table:table-cell>
          <table:table-cell table:style-name="ce11" table:formula="of:=VLOOKUP([.H36];[$収録番号.$A$1:$収録番号.$B$10];2;0)" office:value-type="float" office:value="12" calcext:value-type="float">
            <text:p>12</text:p>
          </table:table-cell>
          <table:table-cell table:style-name="ce11" office:value-type="string" calcext:value-type="string">
            <text:p>N</text:p>
          </table:table-cell>
          <table:table-cell table:style-name="ce11" table:formula="of:=VLOOKUP([.J3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6];[$種類番号.$A$1:$種類番号.$B$4];2;0)" office:value-type="float" office:value="2" calcext:value-type="float">
            <text:p>2</text:p>
          </table:table-cell>
          <table:table-cell table:style-name="ce11" office:value-type="string" calcext:value-type="string">
            <text:p>緑</text:p>
          </table:table-cell>
          <table:table-cell table:style-name="ce11" table:formula="of:=VLOOKUP([.N36];[$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6];[$特性番号.$A$1:$特性番号.$B$8];2;0);0)" office:value-type="float" office:value="0" calcext:value-type="float">
            <text:p>0</text:p>
          </table:table-cell>
          <table:table-cell table:style-name="ce11"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09.png</text:p>
          </table:table-cell>
          <table:table-cell table:style-name="ce11" table:formula="of:=CONCATENATE([$JSON.$A$1];[.$C36];[$JSON.$B$1];[.$E36];[$JSON.$C$1];[.F36];[$JSON.$D$1];[.$G36];[$JSON.$E$1];IF(ISNA([.$T36]);&quot;null&quot;;&quot;&quot;&quot;&quot;&amp;[.$T36]&amp;&quot;&quot;&quot;&quot;);[$JSON.$F$1];[.$V36];[$JSON.$G$1];IF(ISNA([.$X36]);&quot;null&quot;;&quot;&quot;&quot;&quot;&amp;[.$X36]&amp;&quot;&quot;&quot;&quot;);[$JSON.$H$1];[.$AA36];[$JSON.$I$1];[.$I36];[$JSON.$J$1];[.K36];[$JSON.$K$1];[.$M36];[$JSON.$L$1];[.$P36];[$JSON.$M$1];[.$O36];[$JSON.$N$1];[.$S36];[$JSON.$O$1];[.$U36];[$JSON.$P$1];IF(ISNA([.$W36]);&quot;null&quot;;[.$W36]);[$JSON.$Q$1];[.$Y36];[$JSON.$R$1];IF([.$Z36];&quot;true&quot;;&quot;false&quot;);[$JSON.$S$1];[.$A36];[$JSON.$T$1];[.$B36];[$JSON.$U$1])" office:value-type="string" office:string-value="{&quot;id&quot;:&quot;G-9&quot;,&quot;name&quot;:&quot;阿弥陀堂&quot;,&quot;displayName&quot;:&quot;阿弥陀堂&quot;,&quot;kana&quot;:&quot;あみだどう&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rarity&quot;:1,&quot;type&quot;:2,&quot;level&quot;:4,&quot;color&quot;:4,&quot;term&quot;:0,&quot;trait&quot;:0,&quot;power&quot;:null,&quot;legacy&quot;:0,&quot;anyNumCopies&quot;:false,&quot;orderTable&quot;:35,&quot;orderDeck&quot;:336}," calcext:value-type="string">
            <text:p>{"id":"G-9","name":"阿弥陀堂","displayName":"阿弥陀堂","kana":"あみだどう","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rarity":1,"type":2,"level":4,"color":4,"term":0,"trait":0,"power":null,"legacy":0,"anyNumCopies":false,"orderTable":35,"orderDeck":336},</text:p>
          </table:table-cell>
          <table:table-cell table:number-columns-repeated="16356"/>
        </table:table-row>
        <table:table-row table:style-name="ro2">
          <table:table-cell table:style-name="ce11" office:value-type="float" office:value="36" calcext:value-type="float">
            <text:p>36</text:p>
          </table:table-cell>
          <table:table-cell table:style-name="ce11" office:value-type="float" office:value="351" calcext:value-type="float">
            <text:p>351</text:p>
          </table:table-cell>
          <table:table-cell table:style-name="ce21" office:value-type="string" calcext:value-type="string">
            <text:p>G-10</text:p>
          </table:table-cell>
          <table:table-cell table:style-name="ce21" office:value-type="float" office:value="10" calcext:value-type="float">
            <text:p>10</text:p>
          </table:table-cell>
          <table:table-cell table:style-name="ce11" office:value-type="string" calcext:value-type="string">
            <text:p>毘盧遮那仏像</text:p>
          </table:table-cell>
          <table:table-cell table:style-name="ce11" office:value-type="string" calcext:value-type="string">
            <text:p>毘盧遮那仏像 (スターター)</text:p>
          </table:table-cell>
          <table:table-cell table:style-name="ce11" office:value-type="string" calcext:value-type="string">
            <text:p>びるしゃなぶつぞう</text:p>
          </table:table-cell>
          <table:table-cell table:style-name="ce11" office:value-type="string" calcext:value-type="string">
            <text:p>日本の大天才デッキ</text:p>
          </table:table-cell>
          <table:table-cell table:style-name="ce11" table:formula="of:=VLOOKUP([.H37];[$収録番号.$A$1:$収録番号.$B$10];2;0)" office:value-type="float" office:value="12" calcext:value-type="float">
            <text:p>12</text:p>
          </table:table-cell>
          <table:table-cell table:style-name="ce11" office:value-type="string" calcext:value-type="string">
            <text:p>N</text:p>
          </table:table-cell>
          <table:table-cell table:style-name="ce11" table:formula="of:=VLOOKUP([.J3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7];[$種類番号.$A$1:$種類番号.$B$4];2;0)" office:value-type="float" office:value="2" calcext:value-type="float">
            <text:p>2</text:p>
          </table:table-cell>
          <table:table-cell table:style-name="ce11" office:value-type="string" calcext:value-type="string">
            <text:p>緑</text:p>
          </table:table-cell>
          <table:table-cell table:style-name="ce11" table:formula="of:=VLOOKUP([.N37];[$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7];[$特性番号.$A$1:$特性番号.$B$8];2;0);0)" office:value-type="float" office:value="0" calcext:value-type="float">
            <text:p>0</text:p>
          </table:table-cell>
          <table:table-cell table:style-name="ce11" office:value-type="string" calcext:value-type="string">
            <text:p>これが戦場にある間、自分の戦場のイジンは「パワー+1000」を得る。¶自分のエンドフェイズが開始したとき、自分の戦場のカードすべてを起こす。</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10.png</text:p>
          </table:table-cell>
          <table:table-cell table:style-name="ce11" table:formula="of:=CONCATENATE([$JSON.$A$1];[.$C37];[$JSON.$B$1];[.$E37];[$JSON.$C$1];[.F37];[$JSON.$D$1];[.$G37];[$JSON.$E$1];IF(ISNA([.$T37]);&quot;null&quot;;&quot;&quot;&quot;&quot;&amp;[.$T37]&amp;&quot;&quot;&quot;&quot;);[$JSON.$F$1];[.$V37];[$JSON.$G$1];IF(ISNA([.$X37]);&quot;null&quot;;&quot;&quot;&quot;&quot;&amp;[.$X37]&amp;&quot;&quot;&quot;&quot;);[$JSON.$H$1];[.$AA37];[$JSON.$I$1];[.$I37];[$JSON.$J$1];[.K37];[$JSON.$K$1];[.$M37];[$JSON.$L$1];[.$P37];[$JSON.$M$1];[.$O37];[$JSON.$N$1];[.$S37];[$JSON.$O$1];[.$U37];[$JSON.$P$1];IF(ISNA([.$W37]);&quot;null&quot;;[.$W37]);[$JSON.$Q$1];[.$Y37];[$JSON.$R$1];IF([.$Z37];&quot;true&quot;;&quot;false&quot;);[$JSON.$S$1];[.$A37];[$JSON.$T$1];[.$B37];[$JSON.$U$1])" office:value-type="string" office:string-value="{&quot;id&quot;:&quot;G-10&quot;,&quot;name&quot;:&quot;毘盧遮那仏像&quot;,&quot;displayName&quot;:&quot;毘盧遮那仏像 (スターター)&quot;,&quot;kana&quot;:&quot;びるしゃなぶつぞう&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rarity&quot;:1,&quot;type&quot;:2,&quot;level&quot;:6,&quot;color&quot;:4,&quot;term&quot;:0,&quot;trait&quot;:0,&quot;power&quot;:null,&quot;legacy&quot;:1,&quot;anyNumCopies&quot;:false,&quot;orderTable&quot;:36,&quot;orderDeck&quot;:351}," calcext:value-type="string">
            <text:p>{"id":"G-10","name":"毘盧遮那仏像","displayName":"毘盧遮那仏像 (スターター)","kana":"びるしゃなぶつぞう","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rarity":1,"type":2,"level":6,"color":4,"term":0,"trait":0,"power":null,"legacy":1,"anyNumCopies":false,"orderTable":36,"orderDeck":351},</text:p>
          </table:table-cell>
          <table:table-cell table:number-columns-repeated="16356"/>
        </table:table-row>
        <table:table-row table:style-name="ro2">
          <table:table-cell table:style-name="ce11" office:value-type="float" office:value="37" calcext:value-type="float">
            <text:p>37</text:p>
          </table:table-cell>
          <table:table-cell table:style-name="ce11" office:value-type="float" office:value="392" calcext:value-type="float">
            <text:p>392</text:p>
          </table:table-cell>
          <table:table-cell table:style-name="ce21" office:value-type="string" calcext:value-type="string">
            <text:p>G-11</text:p>
          </table:table-cell>
          <table:table-cell table:style-name="ce21" office:value-type="float" office:value="11" calcext:value-type="float">
            <text:p>11</text:p>
          </table:table-cell>
          <table:table-cell table:style-name="ce11" office:value-type="string" calcext:value-type="string">
            <text:p>グロウ</text:p>
          </table:table-cell>
          <table:table-cell table:style-name="ce11" table:formula="of:=[.E38]" office:value-type="string" office:string-value="グロウ" calcext:value-type="string">
            <text:p>グロウ</text:p>
          </table:table-cell>
          <table:table-cell table:style-name="ce11" office:value-type="string" calcext:value-type="string">
            <text:p>ぐろう</text:p>
          </table:table-cell>
          <table:table-cell table:style-name="ce11" office:value-type="string" calcext:value-type="string">
            <text:p>日本の大天才デッキ</text:p>
          </table:table-cell>
          <table:table-cell table:style-name="ce11" table:formula="of:=VLOOKUP([.H38];[$収録番号.$A$1:$収録番号.$B$10];2;0)" office:value-type="float" office:value="12" calcext:value-type="float">
            <text:p>12</text:p>
          </table:table-cell>
          <table:table-cell table:style-name="ce11" office:value-type="string" calcext:value-type="string">
            <text:p>N</text:p>
          </table:table-cell>
          <table:table-cell table:style-name="ce11" table:formula="of:=VLOOKUP([.J3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8];[$種類番号.$A$1:$種類番号.$B$4];2;0)" office:value-type="float" office:value="3" calcext:value-type="float">
            <text:p>3</text:p>
          </table:table-cell>
          <table:table-cell table:style-name="ce11" office:value-type="string" calcext:value-type="string">
            <text:p>緑</text:p>
          </table:table-cell>
          <table:table-cell table:style-name="ce11" table:formula="of:=VLOOKUP([.N38];[$色番号.$A$1:$色番号.$B$10];2;0)" office:value-type="float" office:value="4" calcext:value-type="float">
            <text:p>4</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8];[$特性番号.$A$1:$特性番号.$B$8];2;0);0)" office:value-type="float" office:value="0" calcext:value-type="float">
            <text:p>0</text:p>
          </table:table-cell>
          <table:table-cell table:style-name="ce11" office:value-type="string" calcext:value-type="string">
            <text:p>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8];[$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11.png</text:p>
          </table:table-cell>
          <table:table-cell table:style-name="ce11" table:formula="of:=CONCATENATE([$JSON.$A$1];[.$C38];[$JSON.$B$1];[.$E38];[$JSON.$C$1];[.F38];[$JSON.$D$1];[.$G38];[$JSON.$E$1];IF(ISNA([.$T38]);&quot;null&quot;;&quot;&quot;&quot;&quot;&amp;[.$T38]&amp;&quot;&quot;&quot;&quot;);[$JSON.$F$1];[.$V38];[$JSON.$G$1];IF(ISNA([.$X38]);&quot;null&quot;;&quot;&quot;&quot;&quot;&amp;[.$X38]&amp;&quot;&quot;&quot;&quot;);[$JSON.$H$1];[.$AA38];[$JSON.$I$1];[.$I38];[$JSON.$J$1];[.K38];[$JSON.$K$1];[.$M38];[$JSON.$L$1];[.$P38];[$JSON.$M$1];[.$O38];[$JSON.$N$1];[.$S38];[$JSON.$O$1];[.$U38];[$JSON.$P$1];IF(ISNA([.$W38]);&quot;null&quot;;[.$W38]);[$JSON.$Q$1];[.$Y38];[$JSON.$R$1];IF([.$Z38];&quot;true&quot;;&quot;false&quot;);[$JSON.$S$1];[.$A38];[$JSON.$T$1];[.$B38];[$JSON.$U$1])" office:value-type="string" office:string-value="{&quot;id&quot;:&quot;G-11&quot;,&quot;name&quot;:&quot;グロウ&quot;,&quot;displayName&quot;:&quot;グロウ&quot;,&quot;kana&quot;:&quot;ぐろう&quot;,&quot;traitText&quot;:null,&quot;ruleText&quot;:&quot;自分の山札の上から1枚を、裏のまま魔力ゾーンに置く。&quot;,&quot;legacyText&quot;:&quot;冥府発動&quot;,&quot;imageUrl&quot;:&quot;https://one-draw.jp/ijinden/cardlist/G01/card/G_011.png&quot;,&quot;expansion&quot;:12,&quot;rarity&quot;:1,&quot;type&quot;:3,&quot;level&quot;:3,&quot;color&quot;:4,&quot;term&quot;:0,&quot;trait&quot;:0,&quot;power&quot;:null,&quot;legacy&quot;:2,&quot;anyNumCopies&quot;:false,&quot;orderTable&quot;:37,&quot;orderDeck&quot;:392}," calcext:value-type="string">
            <text:p>{"id":"G-11","name":"グロウ","displayName":"グロウ","kana":"ぐろう","traitText":null,"ruleText":"自分の山札の上から1枚を、裏のまま魔力ゾーンに置く。","legacyText":"冥府発動","imageUrl":"https://one-draw.jp/ijinden/cardlist/G01/card/G_011.png","expansion":12,"rarity":1,"type":3,"level":3,"color":4,"term":0,"trait":0,"power":null,"legacy":2,"anyNumCopies":false,"orderTable":37,"orderDeck":392},</text:p>
          </table:table-cell>
          <table:table-cell table:number-columns-repeated="16356"/>
        </table:table-row>
        <table:table-row table:style-name="ro2">
          <table:table-cell table:style-name="ce11" office:value-type="float" office:value="38" calcext:value-type="float">
            <text:p>38</text:p>
          </table:table-cell>
          <table:table-cell table:style-name="ce11" office:value-type="float" office:value="416" calcext:value-type="float">
            <text:p>416</text:p>
          </table:table-cell>
          <table:table-cell table:style-name="ce21" office:value-type="string" calcext:value-type="string">
            <text:p>G-12</text:p>
          </table:table-cell>
          <table:table-cell table:style-name="ce21" office:value-type="float" office:value="12" calcext:value-type="float">
            <text:p>12</text:p>
          </table:table-cell>
          <table:table-cell table:style-name="ce11" office:value-type="string" calcext:value-type="string">
            <text:p>ギャザリング</text:p>
          </table:table-cell>
          <table:table-cell table:style-name="ce11" office:value-type="string" calcext:value-type="string">
            <text:p>ギャザリング (スターター)</text:p>
          </table:table-cell>
          <table:table-cell table:style-name="ce11" office:value-type="string" calcext:value-type="string">
            <text:p>ぎゃざりんぐ</text:p>
          </table:table-cell>
          <table:table-cell table:style-name="ce11" office:value-type="string" calcext:value-type="string">
            <text:p>日本の大天才デッキ</text:p>
          </table:table-cell>
          <table:table-cell table:style-name="ce11" table:formula="of:=VLOOKUP([.H39];[$収録番号.$A$1:$収録番号.$B$10];2;0)" office:value-type="float" office:value="12" calcext:value-type="float">
            <text:p>12</text:p>
          </table:table-cell>
          <table:table-cell table:style-name="ce11" office:value-type="string" calcext:value-type="string">
            <text:p>N</text:p>
          </table:table-cell>
          <table:table-cell table:style-name="ce11" table:formula="of:=VLOOKUP([.J3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9];[$種類番号.$A$1:$種類番号.$B$4];2;0)" office:value-type="float" office:value="3" calcext:value-type="float">
            <text:p>3</text:p>
          </table:table-cell>
          <table:table-cell table:style-name="ce11" office:value-type="string" calcext:value-type="string">
            <text:p>緑</text:p>
          </table:table-cell>
          <table:table-cell table:style-name="ce11" table:formula="of:=VLOOKUP([.N39];[$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9];[$特性番号.$A$1:$特性番号.$B$8];2;0);0)" office:value-type="float" office:value="0" calcext:value-type="float">
            <text:p>0</text:p>
          </table:table-cell>
          <table:table-cell table:style-name="ce11" office:value-type="string" calcext:value-type="string">
            <text:p>自分の戦場のガーディアンすべてを手札に戻す。自分の山札の上から2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G01/card/G_012.png</text:p>
          </table:table-cell>
          <table:table-cell table:style-name="ce11" table:formula="of:=CONCATENATE([$JSON.$A$1];[.$C39];[$JSON.$B$1];[.$E39];[$JSON.$C$1];[.F39];[$JSON.$D$1];[.$G39];[$JSON.$E$1];IF(ISNA([.$T39]);&quot;null&quot;;&quot;&quot;&quot;&quot;&amp;[.$T39]&amp;&quot;&quot;&quot;&quot;);[$JSON.$F$1];[.$V39];[$JSON.$G$1];IF(ISNA([.$X39]);&quot;null&quot;;&quot;&quot;&quot;&quot;&amp;[.$X39]&amp;&quot;&quot;&quot;&quot;);[$JSON.$H$1];[.$AA39];[$JSON.$I$1];[.$I39];[$JSON.$J$1];[.K39];[$JSON.$K$1];[.$M39];[$JSON.$L$1];[.$P39];[$JSON.$M$1];[.$O39];[$JSON.$N$1];[.$S39];[$JSON.$O$1];[.$U39];[$JSON.$P$1];IF(ISNA([.$W39]);&quot;null&quot;;[.$W39]);[$JSON.$Q$1];[.$Y39];[$JSON.$R$1];IF([.$Z39];&quot;true&quot;;&quot;false&quot;);[$JSON.$S$1];[.$A39];[$JSON.$T$1];[.$B39];[$JSON.$U$1])" office:value-type="string" office:string-value="{&quot;id&quot;:&quot;G-12&quot;,&quot;name&quot;:&quot;ギャザリング&quot;,&quot;displayName&quot;:&quot;ギャザリング (スターター)&quot;,&quot;kana&quot;:&quot;ぎゃざりんぐ&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rarity&quot;:1,&quot;type&quot;:3,&quot;level&quot;:5,&quot;color&quot;:4,&quot;term&quot;:0,&quot;trait&quot;:0,&quot;power&quot;:null,&quot;legacy&quot;:1,&quot;anyNumCopies&quot;:false,&quot;orderTable&quot;:38,&quot;orderDeck&quot;:416}," calcext:value-type="string">
            <text:p>{"id":"G-12","name":"ギャザリング","displayName":"ギャザリング (スターター)","kana":"ぎゃざりんぐ","traitText":null,"ruleText":"自分の戦場のガーディアンすべてを手札に戻す。自分の山札の上から2枚をガーディアンにして戦場に置く。","legacyText":"魔力化","imageUrl":"https://one-draw.jp/ijinden/cardlist/G01/card/G_012.png","expansion":12,"rarity":1,"type":3,"level":5,"color":4,"term":0,"trait":0,"power":null,"legacy":1,"anyNumCopies":false,"orderTable":38,"orderDeck":416},</text:p>
          </table:table-cell>
          <table:table-cell table:number-columns-repeated="16356"/>
        </table:table-row>
        <table:table-row table:style-name="ro2">
          <table:table-cell table:style-name="ce11" office:value-type="float" office:value="39" calcext:value-type="float">
            <text:p>39</text:p>
          </table:table-cell>
          <table:table-cell table:style-name="ce11" office:value-type="float" office:value="449" calcext:value-type="float">
            <text:p>449</text:p>
          </table:table-cell>
          <table:table-cell table:style-name="ce21" office:value-type="string" calcext:value-type="string">
            <text:p>G-13</text:p>
          </table:table-cell>
          <table:table-cell table:style-name="ce21" office:value-type="float" office:value="13" calcext:value-type="float">
            <text:p>13</text:p>
          </table:table-cell>
          <table:table-cell table:style-name="ce11" office:value-type="string" calcext:value-type="string">
            <text:p>グリーンストーン</text:p>
          </table:table-cell>
          <table:table-cell table:style-name="ce11" office:value-type="string" calcext:value-type="string">
            <text:p>グリーンストーン (スターター)</text:p>
          </table:table-cell>
          <table:table-cell table:style-name="ce11" office:value-type="string" calcext:value-type="string">
            <text:p>ぐりーんすとーん</text:p>
          </table:table-cell>
          <table:table-cell table:style-name="ce11" office:value-type="string" calcext:value-type="string">
            <text:p>日本の大天才デッキ</text:p>
          </table:table-cell>
          <table:table-cell table:style-name="ce11" table:formula="of:=VLOOKUP([.H40];[$収録番号.$A$1:$収録番号.$B$10];2;0)" office:value-type="float" office:value="12" calcext:value-type="float">
            <text:p>12</text:p>
          </table:table-cell>
          <table:table-cell table:style-name="ce11" office:value-type="string" calcext:value-type="string">
            <text:p>N</text:p>
          </table:table-cell>
          <table:table-cell table:style-name="ce11" table:formula="of:=VLOOKUP([.J4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40];[$種類番号.$A$1:$種類番号.$B$4];2;0)" office:value-type="float" office:value="4" calcext:value-type="float">
            <text:p>4</text:p>
          </table:table-cell>
          <table:table-cell table:style-name="ce11" office:value-type="string" calcext:value-type="string">
            <text:p>緑</text:p>
          </table:table-cell>
          <table:table-cell table:style-name="ce11" table:formula="of:=VLOOKUP([.N40];[$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0];[$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40];[$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G01/card/G_013.png</text:p>
          </table:table-cell>
          <table:table-cell table:style-name="ce11" table:formula="of:=CONCATENATE([$JSON.$A$1];[.$C40];[$JSON.$B$1];[.$E40];[$JSON.$C$1];[.F40];[$JSON.$D$1];[.$G40];[$JSON.$E$1];IF(ISNA([.$T40]);&quot;null&quot;;&quot;&quot;&quot;&quot;&amp;[.$T40]&amp;&quot;&quot;&quot;&quot;);[$JSON.$F$1];[.$V40];[$JSON.$G$1];IF(ISNA([.$X40]);&quot;null&quot;;&quot;&quot;&quot;&quot;&amp;[.$X40]&amp;&quot;&quot;&quot;&quot;);[$JSON.$H$1];[.$AA40];[$JSON.$I$1];[.$I40];[$JSON.$J$1];[.K40];[$JSON.$K$1];[.$M40];[$JSON.$L$1];[.$P40];[$JSON.$M$1];[.$O40];[$JSON.$N$1];[.$S40];[$JSON.$O$1];[.$U40];[$JSON.$P$1];IF(ISNA([.$W40]);&quot;null&quot;;[.$W40]);[$JSON.$Q$1];[.$Y40];[$JSON.$R$1];IF([.$Z40];&quot;true&quot;;&quot;false&quot;);[$JSON.$S$1];[.$A40];[$JSON.$T$1];[.$B40];[$JSON.$U$1])" office:value-type="string" office:string-value="{&quot;id&quot;:&quot;G-13&quot;,&quot;name&quot;:&quot;グリーンストーン&quot;,&quot;displayName&quot;:&quot;グリーンストーン (スターター)&quot;,&quot;kana&quot;:&quot;ぐりーんすとーん&quot;,&quot;traitText&quot;:null,&quot;ruleText&quot;:&quot;※デッキに何枚でも入れてよい。&quot;,&quot;legacyText&quot;:&quot;復元&quot;,&quot;imageUrl&quot;:&quot;https://one-draw.jp/ijinden/cardlist/G01/card/G_013.png&quot;,&quot;expansion&quot;:12,&quot;rarity&quot;:1,&quot;type&quot;:4,&quot;level&quot;:1,&quot;color&quot;:4,&quot;term&quot;:0,&quot;trait&quot;:0,&quot;power&quot;:null,&quot;legacy&quot;:3,&quot;anyNumCopies&quot;:true,&quot;orderTable&quot;:39,&quot;orderDeck&quot;:449}," calcext:value-type="string">
            <text:p>{"id":"G-13","name":"グリーンストーン","displayName":"グリーンストーン (スターター)","kana":"ぐりーんすとーん","traitText":null,"ruleText":"※デッキに何枚でも入れてよい。","legacyText":"復元","imageUrl":"https://one-draw.jp/ijinden/cardlist/G01/card/G_013.png","expansion":12,"rarity":1,"type":4,"level":1,"color":4,"term":0,"trait":0,"power":null,"legacy":3,"anyNumCopies":true,"orderTable":39,"orderDeck":449},</text:p>
          </table:table-cell>
          <table:table-cell table:number-columns-repeated="16356"/>
        </table:table-row>
        <table:table-row table:style-name="ro2">
          <table:table-cell table:style-name="ce11" office:value-type="float" office:value="40" calcext:value-type="float">
            <text:p>40</text:p>
          </table:table-cell>
          <table:table-cell table:style-name="ce11" office:value-type="float" office:value="136" calcext:value-type="float">
            <text:p>136</text:p>
          </table:table-cell>
          <table:table-cell table:style-name="ce21" office:value-type="string" calcext:value-type="string">
            <text:p>1-1</text:p>
          </table:table-cell>
          <table:table-cell table:style-name="ce21" office:value-type="float" office:value="1" calcext:value-type="float">
            <text:p>1</text:p>
          </table:table-cell>
          <table:table-cell table:style-name="ce11" office:value-type="string" calcext:value-type="string">
            <text:p>織田信長</text:p>
          </table:table-cell>
          <table:table-cell table:style-name="ce11" table:formula="of:=[.E41]" office:value-type="string" office:string-value="織田信長" calcext:value-type="string">
            <text:p>織田信長</text:p>
          </table:table-cell>
          <table:table-cell table:style-name="ce11" office:value-type="string" calcext:value-type="string">
            <text:p>おだのぶなが</text:p>
          </table:table-cell>
          <table:table-cell table:style-name="ce11" office:value-type="string" calcext:value-type="string">
            <text:p>第１弾ブースターパック</text:p>
          </table:table-cell>
          <table:table-cell table:style-name="ce11" table:formula="of:=VLOOKUP([.H41];[$収録番号.$A$1:$収録番号.$B$10];2;0)" office:value-type="float" office:value="15" calcext:value-type="float">
            <text:p>15</text:p>
          </table:table-cell>
          <table:table-cell table:style-name="ce11" office:value-type="string" calcext:value-type="string">
            <text:p>SR</text:p>
          </table:table-cell>
          <table:table-cell table:style-name="ce11" table:formula="of:=VLOOKUP([.J4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41];[$色番号.$A$1:$色番号.$B$5];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1];[$特性番号.$A$1:$特性番号.$B$8];2;0);0)" office:value-type="float" office:value="0" calcext:value-type="float">
            <text:p>0</text:p>
          </table:table-cell>
          <table:table-cell table:style-name="ce11"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4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1.png</text:p>
          </table:table-cell>
          <table:table-cell table:style-name="ce11" table:formula="of:=CONCATENATE([$JSON.$A$1];[.$C41];[$JSON.$B$1];[.$E41];[$JSON.$C$1];[.F41];[$JSON.$D$1];[.$G41];[$JSON.$E$1];IF(ISNA([.$T41]);&quot;null&quot;;&quot;&quot;&quot;&quot;&amp;[.$T41]&amp;&quot;&quot;&quot;&quot;);[$JSON.$F$1];[.$V41];[$JSON.$G$1];IF(ISNA([.$X41]);&quot;null&quot;;&quot;&quot;&quot;&quot;&amp;[.$X41]&amp;&quot;&quot;&quot;&quot;);[$JSON.$H$1];[.$AA41];[$JSON.$I$1];[.$I41];[$JSON.$J$1];[.K41];[$JSON.$K$1];[.$M41];[$JSON.$L$1];[.$P41];[$JSON.$M$1];[.$O41];[$JSON.$N$1];[.$S41];[$JSON.$O$1];[.$U41];[$JSON.$P$1];IF(ISNA([.$W41]);&quot;null&quot;;[.$W41]);[$JSON.$Q$1];[.$Y41];[$JSON.$R$1];IF([.$Z41];&quot;true&quot;;&quot;false&quot;);[$JSON.$S$1];[.$A41];[$JSON.$T$1];[.$B41];[$JSON.$U$1])" office:value-type="string" office:string-value="{&quot;id&quot;:&quot;1-1&quot;,&quot;name&quot;:&quot;織田信長&quot;,&quot;displayName&quot;:&quot;織田信長&quot;,&quot;kana&quot;:&quot;おだのぶなが&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rarity&quot;:4,&quot;type&quot;:1,&quot;level&quot;:4,&quot;color&quot;:1,&quot;term&quot;:0,&quot;trait&quot;:0,&quot;power&quot;:5000,&quot;legacy&quot;:0,&quot;anyNumCopies&quot;:false,&quot;orderTable&quot;:40,&quot;orderDeck&quot;:136}," calcext:value-type="string">
            <text:p>{"id":"1-1","name":"織田信長","displayName":"織田信長","kana":"おだのぶなが","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rarity":4,"type":1,"level":4,"color":1,"term":0,"trait":0,"power":5000,"legacy":0,"anyNumCopies":false,"orderTable":40,"orderDeck":136},</text:p>
          </table:table-cell>
          <table:table-cell table:number-columns-repeated="16356"/>
        </table:table-row>
        <table:table-row table:style-name="ro2">
          <table:table-cell table:style-name="ce11" office:value-type="float" office:value="41" calcext:value-type="float">
            <text:p>41</text:p>
          </table:table-cell>
          <table:table-cell table:style-name="ce11" office:value-type="float" office:value="183" calcext:value-type="float">
            <text:p>183</text:p>
          </table:table-cell>
          <table:table-cell table:style-name="ce21" office:value-type="string" calcext:value-type="string">
            <text:p>1-2</text:p>
          </table:table-cell>
          <table:table-cell table:style-name="ce21" office:value-type="float" office:value="2" calcext:value-type="float">
            <text:p>2</text:p>
          </table:table-cell>
          <table:table-cell table:style-name="ce11" office:value-type="string" calcext:value-type="string">
            <text:p>クレオパトラ</text:p>
          </table:table-cell>
          <table:table-cell table:style-name="ce11" table:formula="of:=[.E42]" office:value-type="string" office:string-value="クレオパトラ" calcext:value-type="string">
            <text:p>クレオパトラ</text:p>
          </table:table-cell>
          <table:table-cell table:style-name="ce11" office:value-type="string" calcext:value-type="string">
            <text:p>くれおぱとら</text:p>
          </table:table-cell>
          <table:table-cell table:style-name="ce11" office:value-type="string" calcext:value-type="string">
            <text:p>第１弾ブースターパック</text:p>
          </table:table-cell>
          <table:table-cell table:style-name="ce11" table:formula="of:=VLOOKUP([.H42];[$収録番号.$A$1:$収録番号.$B$10];2;0)" office:value-type="float" office:value="15" calcext:value-type="float">
            <text:p>15</text:p>
          </table:table-cell>
          <table:table-cell table:style-name="ce11" office:value-type="string" calcext:value-type="string">
            <text:p>SR</text:p>
          </table:table-cell>
          <table:table-cell table:style-name="ce11" table:formula="of:=VLOOKUP([.J4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42];[$色番号.$A$1:$色番号.$B$5];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2];[$特性番号.$A$1:$特性番号.$B$8];2;0);0)" office:value-type="float" office:value="0" calcext:value-type="float">
            <text:p>0</text:p>
          </table:table-cell>
          <table:table-cell table:style-name="ce11" office:value-type="string" calcext:value-type="string">
            <text:p>戦場に置かれたときに発動できる。戦場のハイケイすべてを破壊する。¶ハイケイが破壊されるたび、1ドロー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4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2.png</text:p>
          </table:table-cell>
          <table:table-cell table:style-name="ce11" table:formula="of:=CONCATENATE([$JSON.$A$1];[.$C42];[$JSON.$B$1];[.$E42];[$JSON.$C$1];[.F42];[$JSON.$D$1];[.$G42];[$JSON.$E$1];IF(ISNA([.$T42]);&quot;null&quot;;&quot;&quot;&quot;&quot;&amp;[.$T42]&amp;&quot;&quot;&quot;&quot;);[$JSON.$F$1];[.$V42];[$JSON.$G$1];IF(ISNA([.$X42]);&quot;null&quot;;&quot;&quot;&quot;&quot;&amp;[.$X42]&amp;&quot;&quot;&quot;&quot;);[$JSON.$H$1];[.$AA42];[$JSON.$I$1];[.$I42];[$JSON.$J$1];[.K42];[$JSON.$K$1];[.$M42];[$JSON.$L$1];[.$P42];[$JSON.$M$1];[.$O42];[$JSON.$N$1];[.$S42];[$JSON.$O$1];[.$U42];[$JSON.$P$1];IF(ISNA([.$W42]);&quot;null&quot;;[.$W42]);[$JSON.$Q$1];[.$Y42];[$JSON.$R$1];IF([.$Z42];&quot;true&quot;;&quot;false&quot;);[$JSON.$S$1];[.$A42];[$JSON.$T$1];[.$B42];[$JSON.$U$1])" office:value-type="string" office:string-value="{&quot;id&quot;:&quot;1-2&quot;,&quot;name&quot;:&quot;クレオパトラ&quot;,&quot;displayName&quot;:&quot;クレオパトラ&quot;,&quot;kana&quot;:&quot;くれおぱとら&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rarity&quot;:4,&quot;type&quot;:1,&quot;level&quot;:5,&quot;color&quot;:1,&quot;term&quot;:0,&quot;trait&quot;:0,&quot;power&quot;:3000,&quot;legacy&quot;:4,&quot;anyNumCopies&quot;:false,&quot;orderTable&quot;:41,&quot;orderDeck&quot;:183}," calcext:value-type="string">
            <text:p>{"id":"1-2","name":"クレオパトラ","displayName":"クレオパトラ","kana":"くれおぱとら","traitText":null,"ruleText":"戦場に置かれたときに発動できる。戦場のハイケイすべてを破壊する。¶ハイケイが破壊されるたび、1ドローする。","legacyText":"1ドローする","imageUrl":"https://one-draw.jp/ijinden/cardlist/001/card/01_002.png","expansion":15,"rarity":4,"type":1,"level":5,"color":1,"term":0,"trait":0,"power":3000,"legacy":4,"anyNumCopies":false,"orderTable":41,"orderDeck":183},</text:p>
          </table:table-cell>
          <table:table-cell table:number-columns-repeated="16356"/>
        </table:table-row>
        <table:table-row table:style-name="ro2">
          <table:table-cell table:style-name="ce11" office:value-type="float" office:value="42" calcext:value-type="float">
            <text:p>42</text:p>
          </table:table-cell>
          <table:table-cell table:style-name="ce11" office:value-type="float" office:value="98" calcext:value-type="float">
            <text:p>98</text:p>
          </table:table-cell>
          <table:table-cell table:style-name="ce21" office:value-type="string" calcext:value-type="string">
            <text:p>1-3</text:p>
          </table:table-cell>
          <table:table-cell table:style-name="ce21" office:value-type="float" office:value="3" calcext:value-type="float">
            <text:p>3</text:p>
          </table:table-cell>
          <table:table-cell table:style-name="ce11" office:value-type="string" calcext:value-type="string">
            <text:p>マルティン・ルター</text:p>
          </table:table-cell>
          <table:table-cell table:style-name="ce11" table:formula="of:=[.E43]" office:value-type="string" office:string-value="マルティン・ルター" calcext:value-type="string">
            <text:p>マルティン・ルター</text:p>
          </table:table-cell>
          <table:table-cell table:style-name="ce11" office:value-type="string" calcext:value-type="string">
            <text:p>まるてぃんるたー</text:p>
          </table:table-cell>
          <table:table-cell table:style-name="ce11" office:value-type="string" calcext:value-type="string">
            <text:p>第１弾ブースターパック</text:p>
          </table:table-cell>
          <table:table-cell table:style-name="ce11" table:formula="of:=VLOOKUP([.H43];[$収録番号.$A$1:$収録番号.$B$10];2;0)" office:value-type="float" office:value="15" calcext:value-type="float">
            <text:p>15</text:p>
          </table:table-cell>
          <table:table-cell table:style-name="ce11" office:value-type="string" calcext:value-type="string">
            <text:p>SR</text:p>
          </table:table-cell>
          <table:table-cell table:style-name="ce11" table:formula="of:=VLOOKUP([.J4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3];[$種類番号.$A$1:$種類番号.$B$4];2;0)" office:value-type="float" office:value="1" calcext:value-type="float">
            <text:p>1</text:p>
          </table:table-cell>
          <table:table-cell table:style-name="ce11" office:value-type="string" calcext:value-type="string">
            <text:p>青</text:p>
          </table:table-cell>
          <table:table-cell table:style-name="ce11" table:formula="of:=VLOOKUP([.N43];[$色番号.$A$1:$色番号.$B$5];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3];[$特性番号.$A$1:$特性番号.$B$8];2;0);0)" office:value-type="float" office:value="0" calcext:value-type="float">
            <text:p>0</text:p>
          </table:table-cell>
          <table:table-cell table:style-name="ce11" office:value-type="string" calcext:value-type="string">
            <text:p>相手はマホウ使用に際し、魔力ゾーンの裏のカードを墓地に置くことができない。¶相手のターンの間「パワー+3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4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3.png</text:p>
          </table:table-cell>
          <table:table-cell table:style-name="ce11" table:formula="of:=CONCATENATE([$JSON.$A$1];[.$C43];[$JSON.$B$1];[.$E43];[$JSON.$C$1];[.F43];[$JSON.$D$1];[.$G43];[$JSON.$E$1];IF(ISNA([.$T43]);&quot;null&quot;;&quot;&quot;&quot;&quot;&amp;[.$T43]&amp;&quot;&quot;&quot;&quot;);[$JSON.$F$1];[.$V43];[$JSON.$G$1];IF(ISNA([.$X43]);&quot;null&quot;;&quot;&quot;&quot;&quot;&amp;[.$X43]&amp;&quot;&quot;&quot;&quot;);[$JSON.$H$1];[.$AA43];[$JSON.$I$1];[.$I43];[$JSON.$J$1];[.K43];[$JSON.$K$1];[.$M43];[$JSON.$L$1];[.$P43];[$JSON.$M$1];[.$O43];[$JSON.$N$1];[.$S43];[$JSON.$O$1];[.$U43];[$JSON.$P$1];IF(ISNA([.$W43]);&quot;null&quot;;[.$W43]);[$JSON.$Q$1];[.$Y43];[$JSON.$R$1];IF([.$Z43];&quot;true&quot;;&quot;false&quot;);[$JSON.$S$1];[.$A43];[$JSON.$T$1];[.$B43];[$JSON.$U$1])" office:value-type="string" office:string-value="{&quot;id&quot;:&quot;1-3&quot;,&quot;name&quot;:&quot;マルティン・ルター&quot;,&quot;displayName&quot;:&quot;マルティン・ルター&quot;,&quot;kana&quot;:&quot;まるてぃんるた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rarity&quot;:4,&quot;type&quot;:1,&quot;level&quot;:3,&quot;color&quot;:2,&quot;term&quot;:0,&quot;trait&quot;:0,&quot;power&quot;:2000,&quot;legacy&quot;:4,&quot;anyNumCopies&quot;:false,&quot;orderTable&quot;:42,&quot;orderDeck&quot;:98}," calcext:value-type="string">
            <text:p>{"id":"1-3","name":"マルティン・ルター","displayName":"マルティン・ルター","kana":"まるてぃんるたー","traitText":null,"ruleText":"相手はマホウ使用に際し、魔力ゾーンの裏のカードを墓地に置くことができない。¶相手のターンの間「パワー+3000」を得る。","legacyText":"1ドローする","imageUrl":"https://one-draw.jp/ijinden/cardlist/001/card/01_003.png","expansion":15,"rarity":4,"type":1,"level":3,"color":2,"term":0,"trait":0,"power":2000,"legacy":4,"anyNumCopies":false,"orderTable":42,"orderDeck":98},</text:p>
          </table:table-cell>
          <table:table-cell table:number-columns-repeated="16356"/>
        </table:table-row>
        <table:table-row table:style-name="ro2">
          <table:table-cell table:style-name="ce11" office:value-type="float" office:value="43" calcext:value-type="float">
            <text:p>43</text:p>
          </table:table-cell>
          <table:table-cell table:style-name="ce11" office:value-type="float" office:value="237" calcext:value-type="float">
            <text:p>237</text:p>
          </table:table-cell>
          <table:table-cell table:style-name="ce21" office:value-type="string" calcext:value-type="string">
            <text:p>1-4</text:p>
          </table:table-cell>
          <table:table-cell table:style-name="ce21" office:value-type="float" office:value="4" calcext:value-type="float">
            <text:p>4</text:p>
          </table:table-cell>
          <table:table-cell table:style-name="ce11" office:value-type="string" calcext:value-type="string">
            <text:p>クリストファー・コロンブス</text:p>
          </table:table-cell>
          <table:table-cell table:style-name="ce11" table:formula="of:=[.E44]" office:value-type="string" office:string-value="クリストファー・コロンブス" calcext:value-type="string">
            <text:p>クリストファー・コロンブス</text:p>
          </table:table-cell>
          <table:table-cell table:style-name="ce11" office:value-type="string" calcext:value-type="string">
            <text:p>くりすとふぁーころんぶす</text:p>
          </table:table-cell>
          <table:table-cell table:style-name="ce11" office:value-type="string" calcext:value-type="string">
            <text:p>第１弾ブースターパック</text:p>
          </table:table-cell>
          <table:table-cell table:style-name="ce11" table:formula="of:=VLOOKUP([.H44];[$収録番号.$A$1:$収録番号.$B$10];2;0)" office:value-type="float" office:value="15" calcext:value-type="float">
            <text:p>15</text:p>
          </table:table-cell>
          <table:table-cell table:style-name="ce11" office:value-type="string" calcext:value-type="string">
            <text:p>SR</text:p>
          </table:table-cell>
          <table:table-cell table:style-name="ce11" table:formula="of:=VLOOKUP([.J4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4];[$種類番号.$A$1:$種類番号.$B$4];2;0)" office:value-type="float" office:value="1" calcext:value-type="float">
            <text:p>1</text:p>
          </table:table-cell>
          <table:table-cell table:style-name="ce11" office:value-type="string" calcext:value-type="string">
            <text:p>青</text:p>
          </table:table-cell>
          <table:table-cell table:style-name="ce11" table:formula="of:=VLOOKUP([.N44];[$色番号.$A$1:$色番号.$B$5];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44];[$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44];[$特性番号.$A$1:$特性番号.$B$8];2;0);0)" office:value-type="float" office:value="0" calcext:value-type="float">
            <text:p>0</text:p>
          </table:table-cell>
          <table:table-cell table:style-name="ce11" office:value-type="string" calcext:value-type="string">
            <text:p>ダブルプレッシャー¶イジンからブロックされない。¶航海 - アタッカーになったとき、イジン召喚権+1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4.png</text:p>
          </table:table-cell>
          <table:table-cell table:style-name="ce11" table:formula="of:=CONCATENATE([$JSON.$A$1];[.$C44];[$JSON.$B$1];[.$E44];[$JSON.$C$1];[.F44];[$JSON.$D$1];[.$G44];[$JSON.$E$1];IF(ISNA([.$T44]);&quot;null&quot;;&quot;&quot;&quot;&quot;&amp;[.$T44]&amp;&quot;&quot;&quot;&quot;);[$JSON.$F$1];[.$V44];[$JSON.$G$1];IF(ISNA([.$X44]);&quot;null&quot;;&quot;&quot;&quot;&quot;&amp;[.$X44]&amp;&quot;&quot;&quot;&quot;);[$JSON.$H$1];[.$AA44];[$JSON.$I$1];[.$I44];[$JSON.$J$1];[.K44];[$JSON.$K$1];[.$M44];[$JSON.$L$1];[.$P44];[$JSON.$M$1];[.$O44];[$JSON.$N$1];[.$S44];[$JSON.$O$1];[.$U44];[$JSON.$P$1];IF(ISNA([.$W44]);&quot;null&quot;;[.$W44]);[$JSON.$Q$1];[.$Y44];[$JSON.$R$1];IF([.$Z44];&quot;true&quot;;&quot;false&quot;);[$JSON.$S$1];[.$A44];[$JSON.$T$1];[.$B44];[$JSON.$U$1])" office:value-type="string" office:string-value="{&quot;id&quot;:&quot;1-4&quot;,&quot;name&quot;:&quot;クリストファー・コロンブス&quot;,&quot;displayName&quot;:&quot;クリストファー・コロンブス&quot;,&quot;kana&quot;:&quot;くりすとふぁーころんぶす&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rarity&quot;:4,&quot;type&quot;:1,&quot;level&quot;:6,&quot;color&quot;:2,&quot;term&quot;:1,&quot;trait&quot;:0,&quot;power&quot;:3000,&quot;legacy&quot;:0,&quot;anyNumCopies&quot;:false,&quot;orderTable&quot;:43,&quot;orderDeck&quot;:237}," calcext:value-type="string">
            <text:p>{"id":"1-4","name":"クリストファー・コロンブス","displayName":"クリストファー・コロンブス","kana":"くりすとふぁーころんぶす","traitText":null,"ruleText":"ダブルプレッシャー¶イジンからブロックされない。¶航海 - アタッカーになったとき、イジン召喚権+1する。","legacyText":null,"imageUrl":"https://one-draw.jp/ijinden/cardlist/001/card/01_004.png","expansion":15,"rarity":4,"type":1,"level":6,"color":2,"term":1,"trait":0,"power":3000,"legacy":0,"anyNumCopies":false,"orderTable":43,"orderDeck":237},</text:p>
          </table:table-cell>
          <table:table-cell table:number-columns-repeated="16356"/>
        </table:table-row>
        <table:table-row table:style-name="ro2">
          <table:table-cell table:style-name="ce11" office:value-type="float" office:value="44" calcext:value-type="float">
            <text:p>44</text:p>
          </table:table-cell>
          <table:table-cell table:style-name="ce11" office:value-type="float" office:value="265" calcext:value-type="float">
            <text:p>265</text:p>
          </table:table-cell>
          <table:table-cell table:style-name="ce21" office:value-type="string" calcext:value-type="string">
            <text:p>1-5</text:p>
          </table:table-cell>
          <table:table-cell table:style-name="ce21" office:value-type="float" office:value="5" calcext:value-type="float">
            <text:p>5</text:p>
          </table:table-cell>
          <table:table-cell table:style-name="ce11" office:value-type="string" calcext:value-type="string">
            <text:p>ヴォルフガング・アマデウス・モーツァルト</text:p>
          </table:table-cell>
          <table:table-cell table:style-name="ce11" table:formula="of:=[.E45]" office:value-type="string" office:string-value="ヴォルフガング・アマデウス・モーツァルト" calcext:value-type="string">
            <text:p>ヴォルフガング・アマデウス・モーツァルト</text:p>
          </table:table-cell>
          <table:table-cell table:style-name="ce11" office:value-type="string" calcext:value-type="string">
            <text:p>ゔぉるふがんぐあまでうすもーつぁると</text:p>
          </table:table-cell>
          <table:table-cell table:style-name="ce11" office:value-type="string" calcext:value-type="string">
            <text:p>第１弾ブースターパック</text:p>
          </table:table-cell>
          <table:table-cell table:style-name="ce11" table:formula="of:=VLOOKUP([.H45];[$収録番号.$A$1:$収録番号.$B$10];2;0)" office:value-type="float" office:value="15" calcext:value-type="float">
            <text:p>15</text:p>
          </table:table-cell>
          <table:table-cell table:style-name="ce11" office:value-type="string" calcext:value-type="string">
            <text:p>SR</text:p>
          </table:table-cell>
          <table:table-cell table:style-name="ce11" table:formula="of:=VLOOKUP([.J4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5];[$種類番号.$A$1:$種類番号.$B$4];2;0)" office:value-type="float" office:value="1" calcext:value-type="float">
            <text:p>1</text:p>
          </table:table-cell>
          <table:table-cell table:style-name="ce11" office:value-type="string" calcext:value-type="string">
            <text:p>緑</text:p>
          </table:table-cell>
          <table:table-cell table:style-name="ce11" table:formula="of:=VLOOKUP([.N45];[$色番号.$A$1:$色番号.$B$5];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能力語番号.$A$1:$能力語番号.$B$11];2;0);0)" office:value-type="float" office:value="0" calcext:value-type="float">
            <text:p>0</text:p>
          </table:table-cell>
          <table:table-cell office:value-type="string" calcext:value-type="string">
            <text:p>音楽</text:p>
          </table:table-cell>
          <table:table-cell table:style-name="ce11" table:formula="of:=IFERROR(VLOOKUP([.$T45];[$特性番号.$A$1:$特性番号.$B$8];2;0);0)" office:value-type="float" office:value="4" calcext:value-type="float">
            <text:p>4</text:p>
          </table:table-cell>
          <table:table-cell table:style-name="ce11" office:value-type="string" calcext:value-type="string">
            <text:p>これが戦場にいる間、相手の戦場の「音楽」イジンと、相手の墓地のカードは能力すべてを失う。この能力は、能力によって失われ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4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5.png</text:p>
          </table:table-cell>
          <table:table-cell table:style-name="ce11" table:formula="of:=CONCATENATE([$JSON.$A$1];[.$C45];[$JSON.$B$1];[.$E45];[$JSON.$C$1];[.F45];[$JSON.$D$1];[.$G45];[$JSON.$E$1];IF(ISNA([.$T45]);&quot;null&quot;;&quot;&quot;&quot;&quot;&amp;[.$T45]&amp;&quot;&quot;&quot;&quot;);[$JSON.$F$1];[.$V45];[$JSON.$G$1];IF(ISNA([.$X45]);&quot;null&quot;;&quot;&quot;&quot;&quot;&amp;[.$X45]&amp;&quot;&quot;&quot;&quot;);[$JSON.$H$1];[.$AA45];[$JSON.$I$1];[.$I45];[$JSON.$J$1];[.K45];[$JSON.$K$1];[.$M45];[$JSON.$L$1];[.$P45];[$JSON.$M$1];[.$O45];[$JSON.$N$1];[.$S45];[$JSON.$O$1];[.$U45];[$JSON.$P$1];IF(ISNA([.$W45]);&quot;null&quot;;[.$W45]);[$JSON.$Q$1];[.$Y45];[$JSON.$R$1];IF([.$Z45];&quot;true&quot;;&quot;false&quot;);[$JSON.$S$1];[.$A45];[$JSON.$T$1];[.$B45];[$JSON.$U$1])" office:value-type="string" office:string-value="{&quot;id&quot;:&quot;1-5&quot;,&quot;name&quot;:&quot;ヴォルフガング・アマデウス・モーツァルト&quot;,&quot;displayName&quot;:&quot;ヴォルフガング・アマデウス・モーツァルト&quot;,&quot;kana&quot;:&quot;ゔぉるふがんぐあまでうすもーつぁると&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rarity&quot;:4,&quot;type&quot;:1,&quot;level&quot;:7,&quot;color&quot;:4,&quot;term&quot;:0,&quot;trait&quot;:4,&quot;power&quot;:4000,&quot;legacy&quot;:0,&quot;anyNumCopies&quot;:false,&quot;orderTable&quot;:44,&quot;orderDeck&quot;:265}," calcext:value-type="string">
            <text:p>{"id":"1-5","name":"ヴォルフガング・アマデウス・モーツァルト","displayName":"ヴォルフガング・アマデウス・モーツァルト","kana":"ゔぉるふがんぐあまでうすもーつぁると","traitText":"音楽","ruleText":"これが戦場にいる間、相手の戦場の「音楽」イジンと、相手の墓地のカードは能力すべてを失う。この能力は、能力によって失われない。","legacyText":null,"imageUrl":"https://one-draw.jp/ijinden/cardlist/001/card/01_005.png","expansion":15,"rarity":4,"type":1,"level":7,"color":4,"term":0,"trait":4,"power":4000,"legacy":0,"anyNumCopies":false,"orderTable":44,"orderDeck":265},</text:p>
          </table:table-cell>
          <table:table-cell table:number-columns-repeated="16356"/>
        </table:table-row>
        <table:table-row table:style-name="ro2">
          <table:table-cell table:style-name="ce11" office:value-type="float" office:value="45" calcext:value-type="float">
            <text:p>45</text:p>
          </table:table-cell>
          <table:table-cell table:style-name="ce11" office:value-type="float" office:value="282" calcext:value-type="float">
            <text:p>282</text:p>
          </table:table-cell>
          <table:table-cell table:style-name="ce21" office:value-type="string" calcext:value-type="string">
            <text:p>1-6</text:p>
          </table:table-cell>
          <table:table-cell table:style-name="ce21" office:value-type="float" office:value="6" calcext:value-type="float">
            <text:p>6</text:p>
          </table:table-cell>
          <table:table-cell table:style-name="ce11" office:value-type="string" calcext:value-type="string">
            <text:p>紫式部</text:p>
          </table:table-cell>
          <table:table-cell table:style-name="ce11" table:formula="of:=[.E46]" office:value-type="string" office:string-value="紫式部" calcext:value-type="string">
            <text:p>紫式部</text:p>
          </table:table-cell>
          <table:table-cell table:style-name="ce11" office:value-type="string" calcext:value-type="string">
            <text:p>むらさきしきぶ</text:p>
          </table:table-cell>
          <table:table-cell table:style-name="ce11" office:value-type="string" calcext:value-type="string">
            <text:p>第１弾ブースターパック</text:p>
          </table:table-cell>
          <table:table-cell table:style-name="ce11" table:formula="of:=VLOOKUP([.H46];[$収録番号.$A$1:$収録番号.$B$10];2;0)" office:value-type="float" office:value="15" calcext:value-type="float">
            <text:p>15</text:p>
          </table:table-cell>
          <table:table-cell table:style-name="ce11" office:value-type="string" calcext:value-type="string">
            <text:p>SR</text:p>
          </table:table-cell>
          <table:table-cell table:style-name="ce11" table:formula="of:=VLOOKUP([.J4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46];[$種類番号.$A$1:$種類番号.$B$4];2;0)" office:value-type="float" office:value="1" calcext:value-type="float">
            <text:p>1</text:p>
          </table:table-cell>
          <table:table-cell table:style-name="ce11" office:value-type="string" calcext:value-type="string">
            <text:p>緑</text:p>
          </table:table-cell>
          <table:table-cell table:style-name="ce11" table:formula="of:=VLOOKUP([.N46];[$色番号.$A$1:$色番号.$B$5];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46];[$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46];[$特性番号.$A$1:$特性番号.$B$8];2;0);0)" office:value-type="float" office:value="0" calcext:value-type="float">
            <text:p>0</text:p>
          </table:table-cell>
          <table:table-cell table:style-name="ce11" office:value-type="string" calcext:value-type="string">
            <text:p>執筆 - ハイケイが戦場に置かれるたび、相手の戦場のイジン1体を裏にして魔力ゾーンに置く。</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4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6.png</text:p>
          </table:table-cell>
          <table:table-cell table:style-name="ce11" table:formula="of:=CONCATENATE([$JSON.$A$1];[.$C46];[$JSON.$B$1];[.$E46];[$JSON.$C$1];[.F46];[$JSON.$D$1];[.$G46];[$JSON.$E$1];IF(ISNA([.$T46]);&quot;null&quot;;&quot;&quot;&quot;&quot;&amp;[.$T46]&amp;&quot;&quot;&quot;&quot;);[$JSON.$F$1];[.$V46];[$JSON.$G$1];IF(ISNA([.$X46]);&quot;null&quot;;&quot;&quot;&quot;&quot;&amp;[.$X46]&amp;&quot;&quot;&quot;&quot;);[$JSON.$H$1];[.$AA46];[$JSON.$I$1];[.$I46];[$JSON.$J$1];[.K46];[$JSON.$K$1];[.$M46];[$JSON.$L$1];[.$P46];[$JSON.$M$1];[.$O46];[$JSON.$N$1];[.$S46];[$JSON.$O$1];[.$U46];[$JSON.$P$1];IF(ISNA([.$W46]);&quot;null&quot;;[.$W46]);[$JSON.$Q$1];[.$Y46];[$JSON.$R$1];IF([.$Z46];&quot;true&quot;;&quot;false&quot;);[$JSON.$S$1];[.$A46];[$JSON.$T$1];[.$B46];[$JSON.$U$1])" office:value-type="string" office:string-value="{&quot;id&quot;:&quot;1-6&quot;,&quot;name&quot;:&quot;紫式部&quot;,&quot;displayName&quot;:&quot;紫式部&quot;,&quot;kana&quot;:&quot;むらさきしきぶ&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rarity&quot;:4,&quot;type&quot;:1,&quot;level&quot;:8,&quot;color&quot;:4,&quot;term&quot;:2,&quot;trait&quot;:0,&quot;power&quot;:6000,&quot;legacy&quot;:1,&quot;anyNumCopies&quot;:false,&quot;orderTable&quot;:45,&quot;orderDeck&quot;:282}," calcext:value-type="string">
            <text:p>{"id":"1-6","name":"紫式部","displayName":"紫式部","kana":"むらさきしきぶ","traitText":null,"ruleText":"執筆 - ハイケイが戦場に置かれるたび、相手の戦場のイジン1体を裏にして魔力ゾーンに置く。","legacyText":"魔力化","imageUrl":"https://one-draw.jp/ijinden/cardlist/001/card/01_006.png","expansion":15,"rarity":4,"type":1,"level":8,"color":4,"term":2,"trait":0,"power":6000,"legacy":1,"anyNumCopies":false,"orderTable":45,"orderDeck":282},</text:p>
          </table:table-cell>
          <table:table-cell table:number-columns-repeated="16356"/>
        </table:table-row>
        <table:table-row table:style-name="ro2">
          <table:table-cell table:style-name="ce11" office:value-type="float" office:value="46" calcext:value-type="float">
            <text:p>46</text:p>
          </table:table-cell>
          <table:table-cell table:style-name="ce11" office:value-type="float" office:value="2" calcext:value-type="float">
            <text:p>2</text:p>
          </table:table-cell>
          <table:table-cell table:style-name="ce21" office:value-type="string" calcext:value-type="string">
            <text:p>1-7</text:p>
          </table:table-cell>
          <table:table-cell table:style-name="ce21" office:value-type="float" office:value="7" calcext:value-type="float">
            <text:p>7</text:p>
          </table:table-cell>
          <table:table-cell table:style-name="ce11" office:value-type="string" calcext:value-type="string">
            <text:p>マーサ・ジェーン・カナリー</text:p>
          </table:table-cell>
          <table:table-cell table:style-name="ce11" table:formula="of:=[.E47]" office:value-type="string" office:string-value="マーサ・ジェーン・カナリー" calcext:value-type="string">
            <text:p>マーサ・ジェーン・カナリー</text:p>
          </table:table-cell>
          <table:table-cell table:style-name="ce11" office:value-type="string" calcext:value-type="string">
            <text:p>まーさじぇーんかなりー</text:p>
          </table:table-cell>
          <table:table-cell table:style-name="ce11" office:value-type="string" calcext:value-type="string">
            <text:p>第１弾ブースターパック</text:p>
          </table:table-cell>
          <table:table-cell table:style-name="ce11" table:formula="of:=VLOOKUP([.H47];[$収録番号.$A$1:$収録番号.$B$10];2;0)" office:value-type="float" office:value="15" calcext:value-type="float">
            <text:p>15</text:p>
          </table:table-cell>
          <table:table-cell table:style-name="ce11" office:value-type="string" calcext:value-type="string">
            <text:p>N</text:p>
          </table:table-cell>
          <table:table-cell table:style-name="ce11" table:formula="of:=VLOOKUP([.J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47];[$色番号.$A$1:$色番号.$B$5];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7];[$特性番号.$A$1:$特性番号.$B$8];2;0);0)" office:value-type="float" office:value="0" calcext:value-type="float">
            <text:p>0</text:p>
          </table:table-cell>
          <table:table-cell table:style-name="ce11" office:value-type="string" calcext:value-type="string">
            <text:p>戦場に他の赤のイジンがいる間「即応」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7.png</text:p>
          </table:table-cell>
          <table:table-cell table:style-name="ce11" table:formula="of:=CONCATENATE([$JSON.$A$1];[.$C47];[$JSON.$B$1];[.$E47];[$JSON.$C$1];[.F47];[$JSON.$D$1];[.$G47];[$JSON.$E$1];IF(ISNA([.$T47]);&quot;null&quot;;&quot;&quot;&quot;&quot;&amp;[.$T47]&amp;&quot;&quot;&quot;&quot;);[$JSON.$F$1];[.$V47];[$JSON.$G$1];IF(ISNA([.$X47]);&quot;null&quot;;&quot;&quot;&quot;&quot;&amp;[.$X47]&amp;&quot;&quot;&quot;&quot;);[$JSON.$H$1];[.$AA47];[$JSON.$I$1];[.$I47];[$JSON.$J$1];[.K47];[$JSON.$K$1];[.$M47];[$JSON.$L$1];[.$P47];[$JSON.$M$1];[.$O47];[$JSON.$N$1];[.$S47];[$JSON.$O$1];[.$U47];[$JSON.$P$1];IF(ISNA([.$W47]);&quot;null&quot;;[.$W47]);[$JSON.$Q$1];[.$Y47];[$JSON.$R$1];IF([.$Z47];&quot;true&quot;;&quot;false&quot;);[$JSON.$S$1];[.$A47];[$JSON.$T$1];[.$B47];[$JSON.$U$1])" office:value-type="string" office:string-value="{&quot;id&quot;:&quot;1-7&quot;,&quot;name&quot;:&quot;マーサ・ジェーン・カナリー&quot;,&quot;displayName&quot;:&quot;マーサ・ジェーン・カナリー&quot;,&quot;kana&quot;:&quot;まーさじぇーんかなりー&quot;,&quot;traitText&quot;:null,&quot;ruleText&quot;:&quot;戦場に他の赤のイジンがいる間「即応」を得る。&quot;,&quot;legacyText&quot;:&quot;1ドローする&quot;,&quot;imageUrl&quot;:&quot;https://one-draw.jp/ijinden/cardlist/001/card/01_007.png&quot;,&quot;expansion&quot;:15,&quot;rarity&quot;:1,&quot;type&quot;:1,&quot;level&quot;:1,&quot;color&quot;:1,&quot;term&quot;:0,&quot;trait&quot;:0,&quot;power&quot;:1000,&quot;legacy&quot;:4,&quot;anyNumCopies&quot;:false,&quot;orderTable&quot;:46,&quot;orderDeck&quot;:2}," calcext:value-type="string">
            <text:p>{"id":"1-7","name":"マーサ・ジェーン・カナリー","displayName":"マーサ・ジェーン・カナリー","kana":"まーさじぇーんかなりー","traitText":null,"ruleText":"戦場に他の赤のイジンがいる間「即応」を得る。","legacyText":"1ドローする","imageUrl":"https://one-draw.jp/ijinden/cardlist/001/card/01_007.png","expansion":15,"rarity":1,"type":1,"level":1,"color":1,"term":0,"trait":0,"power":1000,"legacy":4,"anyNumCopies":false,"orderTable":46,"orderDeck":2},</text:p>
          </table:table-cell>
          <table:table-cell table:number-columns-repeated="16356"/>
        </table:table-row>
        <table:table-row table:style-name="ro2">
          <table:table-cell table:style-name="ce11" office:value-type="float" office:value="47" calcext:value-type="float">
            <text:p>47</text:p>
          </table:table-cell>
          <table:table-cell table:style-name="ce11" office:value-type="float" office:value="32" calcext:value-type="float">
            <text:p>32</text:p>
          </table:table-cell>
          <table:table-cell table:style-name="ce21" office:value-type="string" calcext:value-type="string">
            <text:p>1-8</text:p>
          </table:table-cell>
          <table:table-cell table:style-name="ce21" office:value-type="float" office:value="8" calcext:value-type="float">
            <text:p>8</text:p>
          </table:table-cell>
          <table:table-cell table:style-name="ce11" office:value-type="string" calcext:value-type="string">
            <text:p>明智光秀</text:p>
          </table:table-cell>
          <table:table-cell table:style-name="ce11" table:formula="of:=[.E48]" office:value-type="string" office:string-value="明智光秀" calcext:value-type="string">
            <text:p>明智光秀</text:p>
          </table:table-cell>
          <table:table-cell table:style-name="ce11" office:value-type="string" calcext:value-type="string">
            <text:p>あけちみつひで</text:p>
          </table:table-cell>
          <table:table-cell table:style-name="ce11" office:value-type="string" calcext:value-type="string">
            <text:p>第１弾ブースターパック</text:p>
          </table:table-cell>
          <table:table-cell table:style-name="ce11" table:formula="of:=VLOOKUP([.H48];[$収録番号.$A$1:$収録番号.$B$10];2;0)" office:value-type="float" office:value="15" calcext:value-type="float">
            <text:p>15</text:p>
          </table:table-cell>
          <table:table-cell table:style-name="ce11" office:value-type="string" calcext:value-type="string">
            <text:p>N</text:p>
          </table:table-cell>
          <table:table-cell table:style-name="ce11" table:formula="of:=VLOOKUP([.J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8];[$種類番号.$A$1:$種類番号.$B$4];2;0)" office:value-type="float" office:value="1" calcext:value-type="float">
            <text:p>1</text:p>
          </table:table-cell>
          <table:table-cell table:style-name="ce11" office:value-type="string" calcext:value-type="string">
            <text:p>赤</text:p>
          </table:table-cell>
          <table:table-cell table:style-name="ce11" table:formula="of:=VLOOKUP([.N48];[$色番号.$A$1:$色番号.$B$5];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能力語番号.$A$1:$能力語番号.$B$11];2;0);0)" office:value-type="float" office:value="0" calcext:value-type="float">
            <text:p>0</text:p>
          </table:table-cell>
          <table:table-cell office:value-type="string" calcext:value-type="string">
            <text:p>剣術</text:p>
          </table:table-cell>
          <table:table-cell table:style-name="ce11" table:formula="of:=IFERROR(VLOOKUP([.$T48];[$特性番号.$A$1:$特性番号.$B$8];2;0);0)" office:value-type="float" office:value="1" calcext:value-type="float">
            <text:p>1</text:p>
          </table:table-cell>
          <table:table-cell table:style-name="ce11" office:value-type="string" calcext:value-type="string">
            <text:p>即応¶戦場に置かれたとき、自分の戦場のガーディアン1体を山札の上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8.png</text:p>
          </table:table-cell>
          <table:table-cell table:style-name="ce11" table:formula="of:=CONCATENATE([$JSON.$A$1];[.$C48];[$JSON.$B$1];[.$E48];[$JSON.$C$1];[.F48];[$JSON.$D$1];[.$G48];[$JSON.$E$1];IF(ISNA([.$T48]);&quot;null&quot;;&quot;&quot;&quot;&quot;&amp;[.$T48]&amp;&quot;&quot;&quot;&quot;);[$JSON.$F$1];[.$V48];[$JSON.$G$1];IF(ISNA([.$X48]);&quot;null&quot;;&quot;&quot;&quot;&quot;&amp;[.$X48]&amp;&quot;&quot;&quot;&quot;);[$JSON.$H$1];[.$AA48];[$JSON.$I$1];[.$I48];[$JSON.$J$1];[.K48];[$JSON.$K$1];[.$M48];[$JSON.$L$1];[.$P48];[$JSON.$M$1];[.$O48];[$JSON.$N$1];[.$S48];[$JSON.$O$1];[.$U48];[$JSON.$P$1];IF(ISNA([.$W48]);&quot;null&quot;;[.$W48]);[$JSON.$Q$1];[.$Y48];[$JSON.$R$1];IF([.$Z48];&quot;true&quot;;&quot;false&quot;);[$JSON.$S$1];[.$A48];[$JSON.$T$1];[.$B48];[$JSON.$U$1])" office:value-type="string" office:string-value="{&quot;id&quot;:&quot;1-8&quot;,&quot;name&quot;:&quot;明智光秀&quot;,&quot;displayName&quot;:&quot;明智光秀&quot;,&quot;kana&quot;:&quot;あけちみつひで&quot;,&quot;traitText&quot;:&quot;剣術&quot;,&quot;ruleText&quot;:&quot;即応¶戦場に置かれたとき、自分の戦場のガーディアン1体を山札の上に戻す。&quot;,&quot;legacyText&quot;:null,&quot;imageUrl&quot;:&quot;https://one-draw.jp/ijinden/cardlist/001/card/01_008.png&quot;,&quot;expansion&quot;:15,&quot;rarity&quot;:1,&quot;type&quot;:1,&quot;level&quot;:2,&quot;color&quot;:1,&quot;term&quot;:0,&quot;trait&quot;:1,&quot;power&quot;:3000,&quot;legacy&quot;:0,&quot;anyNumCopies&quot;:false,&quot;orderTable&quot;:47,&quot;orderDeck&quot;:32}," calcext:value-type="string">
            <text:p>{"id":"1-8","name":"明智光秀","displayName":"明智光秀","kana":"あけちみつひで","traitText":"剣術","ruleText":"即応¶戦場に置かれたとき、自分の戦場のガーディアン1体を山札の上に戻す。","legacyText":null,"imageUrl":"https://one-draw.jp/ijinden/cardlist/001/card/01_008.png","expansion":15,"rarity":1,"type":1,"level":2,"color":1,"term":0,"trait":1,"power":3000,"legacy":0,"anyNumCopies":false,"orderTable":47,"orderDeck":32},</text:p>
          </table:table-cell>
          <table:table-cell table:number-columns-repeated="16356"/>
        </table:table-row>
        <table:table-row table:style-name="ro2">
          <table:table-cell table:style-name="ce11" office:value-type="float" office:value="48" calcext:value-type="float">
            <text:p>48</text:p>
          </table:table-cell>
          <table:table-cell table:style-name="ce11" office:value-type="float" office:value="33" calcext:value-type="float">
            <text:p>33</text:p>
          </table:table-cell>
          <table:table-cell table:style-name="ce21" office:value-type="string" calcext:value-type="string">
            <text:p>1-9</text:p>
          </table:table-cell>
          <table:table-cell table:style-name="ce21" office:value-type="float" office:value="9" calcext:value-type="float">
            <text:p>9</text:p>
          </table:table-cell>
          <table:table-cell table:style-name="ce11" office:value-type="string" calcext:value-type="string">
            <text:p>藤原純友</text:p>
          </table:table-cell>
          <table:table-cell table:style-name="ce11" table:formula="of:=[.E49]" office:value-type="string" office:string-value="藤原純友" calcext:value-type="string">
            <text:p>藤原純友</text:p>
          </table:table-cell>
          <table:table-cell table:style-name="ce11" office:value-type="string" calcext:value-type="string">
            <text:p>ふじわらのすみとも</text:p>
          </table:table-cell>
          <table:table-cell table:style-name="ce11" office:value-type="string" calcext:value-type="string">
            <text:p>第１弾ブースターパック</text:p>
          </table:table-cell>
          <table:table-cell table:style-name="ce11" table:formula="of:=VLOOKUP([.H49];[$収録番号.$A$1:$収録番号.$B$10];2;0)" office:value-type="float" office:value="15" calcext:value-type="float">
            <text:p>15</text:p>
          </table:table-cell>
          <table:table-cell table:style-name="ce11" office:value-type="string" calcext:value-type="string">
            <text:p>N</text:p>
          </table:table-cell>
          <table:table-cell table:style-name="ce11" table:formula="of:=VLOOKUP([.J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49];[$種類番号.$A$1:$種類番号.$B$4];2;0)" office:value-type="float" office:value="1" calcext:value-type="float">
            <text:p>1</text:p>
          </table:table-cell>
          <table:table-cell table:style-name="ce11" office:value-type="string" calcext:value-type="string">
            <text:p>赤</text:p>
          </table:table-cell>
          <table:table-cell table:style-name="ce11" table:formula="of:=VLOOKUP([.N49];[$色番号.$A$1:$色番号.$B$5];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49];[$能力語番号.$A$1:$能力語番号.$B$11];2;0);0)" office:value-type="float" office:value="1" calcext:value-type="float">
            <text:p>1</text:p>
          </table:table-cell>
          <table:table-cell office:value-type="string" calcext:value-type="string">
            <text:p>剣術</text:p>
          </table:table-cell>
          <table:table-cell table:style-name="ce11" table:formula="of:=IFERROR(VLOOKUP([.$T49];[$特性番号.$A$1:$特性番号.$B$8];2;0);0)" office:value-type="float" office:value="1" calcext:value-type="float">
            <text:p>1</text:p>
          </table:table-cell>
          <table:table-cell table:style-name="ce11" office:value-type="string" calcext:value-type="string">
            <text:p>航海 - アタッカーになったとき、相手の戦場のハイケイ1つ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4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09.png</text:p>
          </table:table-cell>
          <table:table-cell table:style-name="ce11" table:formula="of:=CONCATENATE([$JSON.$A$1];[.$C49];[$JSON.$B$1];[.$E49];[$JSON.$C$1];[.F49];[$JSON.$D$1];[.$G49];[$JSON.$E$1];IF(ISNA([.$T49]);&quot;null&quot;;&quot;&quot;&quot;&quot;&amp;[.$T49]&amp;&quot;&quot;&quot;&quot;);[$JSON.$F$1];[.$V49];[$JSON.$G$1];IF(ISNA([.$X49]);&quot;null&quot;;&quot;&quot;&quot;&quot;&amp;[.$X49]&amp;&quot;&quot;&quot;&quot;);[$JSON.$H$1];[.$AA49];[$JSON.$I$1];[.$I49];[$JSON.$J$1];[.K49];[$JSON.$K$1];[.$M49];[$JSON.$L$1];[.$P49];[$JSON.$M$1];[.$O49];[$JSON.$N$1];[.$S49];[$JSON.$O$1];[.$U49];[$JSON.$P$1];IF(ISNA([.$W49]);&quot;null&quot;;[.$W49]);[$JSON.$Q$1];[.$Y49];[$JSON.$R$1];IF([.$Z49];&quot;true&quot;;&quot;false&quot;);[$JSON.$S$1];[.$A49];[$JSON.$T$1];[.$B49];[$JSON.$U$1])" office:value-type="string" office:string-value="{&quot;id&quot;:&quot;1-9&quot;,&quot;name&quot;:&quot;藤原純友&quot;,&quot;displayName&quot;:&quot;藤原純友&quot;,&quot;kana&quot;:&quot;ふじわらのすみとも&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rarity&quot;:1,&quot;type&quot;:1,&quot;level&quot;:2,&quot;color&quot;:1,&quot;term&quot;:1,&quot;trait&quot;:1,&quot;power&quot;:1000,&quot;legacy&quot;:4,&quot;anyNumCopies&quot;:false,&quot;orderTable&quot;:48,&quot;orderDeck&quot;:33}," calcext:value-type="string">
            <text:p>{"id":"1-9","name":"藤原純友","displayName":"藤原純友","kana":"ふじわらのすみとも","traitText":"剣術","ruleText":"航海 - アタッカーになったとき、相手の戦場のハイケイ1つを破壊する。","legacyText":"1ドローする","imageUrl":"https://one-draw.jp/ijinden/cardlist/001/card/01_009.png","expansion":15,"rarity":1,"type":1,"level":2,"color":1,"term":1,"trait":1,"power":1000,"legacy":4,"anyNumCopies":false,"orderTable":48,"orderDeck":33},</text:p>
          </table:table-cell>
          <table:table-cell table:number-columns-repeated="16356"/>
        </table:table-row>
        <table:table-row table:style-name="ro2">
          <table:table-cell table:style-name="ce11" office:value-type="float" office:value="49" calcext:value-type="float">
            <text:p>49</text:p>
          </table:table-cell>
          <table:table-cell table:style-name="ce11" office:value-type="float" office:value="82" calcext:value-type="float">
            <text:p>82</text:p>
          </table:table-cell>
          <table:table-cell table:style-name="ce21" office:value-type="string" calcext:value-type="string">
            <text:p>1-10</text:p>
          </table:table-cell>
          <table:table-cell table:style-name="ce21" office:value-type="float" office:value="10" calcext:value-type="float">
            <text:p>10</text:p>
          </table:table-cell>
          <table:table-cell table:style-name="ce11" office:value-type="string" calcext:value-type="string">
            <text:p>徳川家康</text:p>
          </table:table-cell>
          <table:table-cell table:style-name="ce11" table:formula="of:=[.E50]" office:value-type="string" office:string-value="徳川家康" calcext:value-type="string">
            <text:p>徳川家康</text:p>
          </table:table-cell>
          <table:table-cell table:style-name="ce11" office:value-type="string" calcext:value-type="string">
            <text:p>とくがわいえやす</text:p>
          </table:table-cell>
          <table:table-cell table:style-name="ce11" office:value-type="string" calcext:value-type="string">
            <text:p>第１弾ブースターパック</text:p>
          </table:table-cell>
          <table:table-cell table:style-name="ce11" table:formula="of:=VLOOKUP([.H50];[$収録番号.$A$1:$収録番号.$B$10];2;0)" office:value-type="float" office:value="15" calcext:value-type="float">
            <text:p>15</text:p>
          </table:table-cell>
          <table:table-cell table:style-name="ce11" office:value-type="string" calcext:value-type="string">
            <text:p>N</text:p>
          </table:table-cell>
          <table:table-cell table:style-name="ce11" table:formula="of:=VLOOKUP([.J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0];[$種類番号.$A$1:$種類番号.$B$4];2;0)" office:value-type="float" office:value="1" calcext:value-type="float">
            <text:p>1</text:p>
          </table:table-cell>
          <table:table-cell table:style-name="ce11" office:value-type="string" calcext:value-type="string">
            <text:p>赤</text:p>
          </table:table-cell>
          <table:table-cell table:style-name="ce11" table:formula="of:=VLOOKUP([.N50];[$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0];[$能力語番号.$A$1:$能力語番号.$B$11];2;0);0)" office:value-type="float" office:value="0" calcext:value-type="float">
            <text:p>0</text:p>
          </table:table-cell>
          <table:table-cell office:value-type="string" calcext:value-type="string">
            <text:p>剣術</text:p>
          </table:table-cell>
          <table:table-cell table:style-name="ce11" table:formula="of:=IFERROR(VLOOKUP([.$T50];[$特性番号.$A$1:$特性番号.$B$8];2;0);0)" office:value-type="float" office:value="1" calcext:value-type="float">
            <text:p>1</text:p>
          </table:table-cell>
          <table:table-cell table:style-name="ce11" office:value-type="string" calcext:value-type="string">
            <text:p>戦場に置かれたとき、イジン召喚権+1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5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0.png</text:p>
          </table:table-cell>
          <table:table-cell table:style-name="ce11" table:formula="of:=CONCATENATE([$JSON.$A$1];[.$C50];[$JSON.$B$1];[.$E50];[$JSON.$C$1];[.F50];[$JSON.$D$1];[.$G50];[$JSON.$E$1];IF(ISNA([.$T50]);&quot;null&quot;;&quot;&quot;&quot;&quot;&amp;[.$T50]&amp;&quot;&quot;&quot;&quot;);[$JSON.$F$1];[.$V50];[$JSON.$G$1];IF(ISNA([.$X50]);&quot;null&quot;;&quot;&quot;&quot;&quot;&amp;[.$X50]&amp;&quot;&quot;&quot;&quot;);[$JSON.$H$1];[.$AA50];[$JSON.$I$1];[.$I50];[$JSON.$J$1];[.K50];[$JSON.$K$1];[.$M50];[$JSON.$L$1];[.$P50];[$JSON.$M$1];[.$O50];[$JSON.$N$1];[.$S50];[$JSON.$O$1];[.$U50];[$JSON.$P$1];IF(ISNA([.$W50]);&quot;null&quot;;[.$W50]);[$JSON.$Q$1];[.$Y50];[$JSON.$R$1];IF([.$Z50];&quot;true&quot;;&quot;false&quot;);[$JSON.$S$1];[.$A50];[$JSON.$T$1];[.$B50];[$JSON.$U$1])" office:value-type="string" office:string-value="{&quot;id&quot;:&quot;1-10&quot;,&quot;name&quot;:&quot;徳川家康&quot;,&quot;displayName&quot;:&quot;徳川家康&quot;,&quot;kana&quot;:&quot;とくがわいえやす&quot;,&quot;traitText&quot;:&quot;剣術&quot;,&quot;ruleText&quot;:&quot;戦場に置かれたとき、イジン召喚権+1する。&quot;,&quot;legacyText&quot;:&quot;1ドローする&quot;,&quot;imageUrl&quot;:&quot;https://one-draw.jp/ijinden/cardlist/001/card/01_010.png&quot;,&quot;expansion&quot;:15,&quot;rarity&quot;:1,&quot;type&quot;:1,&quot;level&quot;:3,&quot;color&quot;:1,&quot;term&quot;:0,&quot;trait&quot;:1,&quot;power&quot;:2000,&quot;legacy&quot;:4,&quot;anyNumCopies&quot;:false,&quot;orderTable&quot;:49,&quot;orderDeck&quot;:82}," calcext:value-type="string">
            <text:p>{"id":"1-10","name":"徳川家康","displayName":"徳川家康","kana":"とくがわいえやす","traitText":"剣術","ruleText":"戦場に置かれたとき、イジン召喚権+1する。","legacyText":"1ドローする","imageUrl":"https://one-draw.jp/ijinden/cardlist/001/card/01_010.png","expansion":15,"rarity":1,"type":1,"level":3,"color":1,"term":0,"trait":1,"power":2000,"legacy":4,"anyNumCopies":false,"orderTable":49,"orderDeck":82},</text:p>
          </table:table-cell>
          <table:table-cell table:number-columns-repeated="16356"/>
        </table:table-row>
        <table:table-row table:style-name="ro2">
          <table:table-cell table:style-name="ce11" office:value-type="float" office:value="50" calcext:value-type="float">
            <text:p>50</text:p>
          </table:table-cell>
          <table:table-cell table:style-name="ce11" office:value-type="float" office:value="83" calcext:value-type="float">
            <text:p>83</text:p>
          </table:table-cell>
          <table:table-cell table:style-name="ce21" office:value-type="string" calcext:value-type="string">
            <text:p>1-11</text:p>
          </table:table-cell>
          <table:table-cell table:style-name="ce21" office:value-type="float" office:value="11" calcext:value-type="float">
            <text:p>11</text:p>
          </table:table-cell>
          <table:table-cell table:style-name="ce11" office:value-type="string" calcext:value-type="string">
            <text:p>直江兼続</text:p>
          </table:table-cell>
          <table:table-cell table:style-name="ce11" table:formula="of:=[.E51]" office:value-type="string" office:string-value="直江兼続" calcext:value-type="string">
            <text:p>直江兼続</text:p>
          </table:table-cell>
          <table:table-cell table:style-name="ce11" office:value-type="string" calcext:value-type="string">
            <text:p>なおえかねつぐ</text:p>
          </table:table-cell>
          <table:table-cell table:style-name="ce11" office:value-type="string" calcext:value-type="string">
            <text:p>第１弾ブースターパック</text:p>
          </table:table-cell>
          <table:table-cell table:style-name="ce11" table:formula="of:=VLOOKUP([.H51];[$収録番号.$A$1:$収録番号.$B$10];2;0)" office:value-type="float" office:value="15" calcext:value-type="float">
            <text:p>15</text:p>
          </table:table-cell>
          <table:table-cell table:style-name="ce11" office:value-type="string" calcext:value-type="string">
            <text:p>N</text:p>
          </table:table-cell>
          <table:table-cell table:style-name="ce11" table:formula="of:=VLOOKUP([.J5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1];[$種類番号.$A$1:$種類番号.$B$4];2;0)" office:value-type="float" office:value="1" calcext:value-type="float">
            <text:p>1</text:p>
          </table:table-cell>
          <table:table-cell table:style-name="ce11" office:value-type="string" calcext:value-type="string">
            <text:p>赤</text:p>
          </table:table-cell>
          <table:table-cell table:style-name="ce11" table:formula="of:=VLOOKUP([.N51];[$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1];[$能力語番号.$A$1:$能力語番号.$B$11];2;0);0)" office:value-type="float" office:value="0" calcext:value-type="float">
            <text:p>0</text:p>
          </table:table-cell>
          <table:table-cell office:value-type="string" calcext:value-type="string">
            <text:p>剣術</text:p>
          </table:table-cell>
          <table:table-cell table:style-name="ce11" table:formula="of:=IFERROR(VLOOKUP([.$T51];[$特性番号.$A$1:$特性番号.$B$8];2;0);0)" office:value-type="float" office:value="1" calcext:value-type="float">
            <text:p>1</text:p>
          </table:table-cell>
          <table:table-cell table:style-name="ce11" office:value-type="string" calcext:value-type="string">
            <text:p>これが戦場にいる間、自分の戦場の「剣術」イジンは「アタック+2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5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1.png</text:p>
          </table:table-cell>
          <table:table-cell table:style-name="ce11" table:formula="of:=CONCATENATE([$JSON.$A$1];[.$C51];[$JSON.$B$1];[.$E51];[$JSON.$C$1];[.F51];[$JSON.$D$1];[.$G51];[$JSON.$E$1];IF(ISNA([.$T51]);&quot;null&quot;;&quot;&quot;&quot;&quot;&amp;[.$T51]&amp;&quot;&quot;&quot;&quot;);[$JSON.$F$1];[.$V51];[$JSON.$G$1];IF(ISNA([.$X51]);&quot;null&quot;;&quot;&quot;&quot;&quot;&amp;[.$X51]&amp;&quot;&quot;&quot;&quot;);[$JSON.$H$1];[.$AA51];[$JSON.$I$1];[.$I51];[$JSON.$J$1];[.K51];[$JSON.$K$1];[.$M51];[$JSON.$L$1];[.$P51];[$JSON.$M$1];[.$O51];[$JSON.$N$1];[.$S51];[$JSON.$O$1];[.$U51];[$JSON.$P$1];IF(ISNA([.$W51]);&quot;null&quot;;[.$W51]);[$JSON.$Q$1];[.$Y51];[$JSON.$R$1];IF([.$Z51];&quot;true&quot;;&quot;false&quot;);[$JSON.$S$1];[.$A51];[$JSON.$T$1];[.$B51];[$JSON.$U$1])" office:value-type="string" office:string-value="{&quot;id&quot;:&quot;1-11&quot;,&quot;name&quot;:&quot;直江兼続&quot;,&quot;displayName&quot;:&quot;直江兼続&quot;,&quot;kana&quot;:&quot;なおえかねつぐ&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rarity&quot;:1,&quot;type&quot;:1,&quot;level&quot;:3,&quot;color&quot;:1,&quot;term&quot;:0,&quot;trait&quot;:1,&quot;power&quot;:1000,&quot;legacy&quot;:4,&quot;anyNumCopies&quot;:false,&quot;orderTable&quot;:50,&quot;orderDeck&quot;:83}," calcext:value-type="string">
            <text:p>{"id":"1-11","name":"直江兼続","displayName":"直江兼続","kana":"なおえかねつぐ","traitText":"剣術","ruleText":"これが戦場にいる間、自分の戦場の「剣術」イジンは「アタック+2000」を得る。","legacyText":"1ドローする","imageUrl":"https://one-draw.jp/ijinden/cardlist/001/card/01_011.png","expansion":15,"rarity":1,"type":1,"level":3,"color":1,"term":0,"trait":1,"power":1000,"legacy":4,"anyNumCopies":false,"orderTable":50,"orderDeck":83},</text:p>
          </table:table-cell>
          <table:table-cell table:number-columns-repeated="16356"/>
        </table:table-row>
        <table:table-row table:style-name="ro2">
          <table:table-cell table:style-name="ce11" office:value-type="float" office:value="51" calcext:value-type="float">
            <text:p>51</text:p>
          </table:table-cell>
          <table:table-cell table:style-name="ce11" office:value-type="float" office:value="84" calcext:value-type="float">
            <text:p>84</text:p>
          </table:table-cell>
          <table:table-cell table:style-name="ce21" office:value-type="string" calcext:value-type="string">
            <text:p>1-12</text:p>
          </table:table-cell>
          <table:table-cell table:style-name="ce21" office:value-type="float" office:value="12" calcext:value-type="float">
            <text:p>12</text:p>
          </table:table-cell>
          <table:table-cell table:style-name="ce11" office:value-type="string" calcext:value-type="string">
            <text:p>藤原頼通</text:p>
          </table:table-cell>
          <table:table-cell table:style-name="ce11" table:formula="of:=[.E52]" office:value-type="string" office:string-value="藤原頼通" calcext:value-type="string">
            <text:p>藤原頼通</text:p>
          </table:table-cell>
          <table:table-cell table:style-name="ce11" office:value-type="string" calcext:value-type="string">
            <text:p>ふじわらのよりみち</text:p>
          </table:table-cell>
          <table:table-cell table:style-name="ce11" office:value-type="string" calcext:value-type="string">
            <text:p>第１弾ブースターパック</text:p>
          </table:table-cell>
          <table:table-cell table:style-name="ce11" table:formula="of:=VLOOKUP([.H52];[$収録番号.$A$1:$収録番号.$B$10];2;0)" office:value-type="float" office:value="15" calcext:value-type="float">
            <text:p>15</text:p>
          </table:table-cell>
          <table:table-cell table:style-name="ce11" office:value-type="string" calcext:value-type="string">
            <text:p>N</text:p>
          </table:table-cell>
          <table:table-cell table:style-name="ce11" table:formula="of:=VLOOKUP([.J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2];[$種類番号.$A$1:$種類番号.$B$4];2;0)" office:value-type="float" office:value="1" calcext:value-type="float">
            <text:p>1</text:p>
          </table:table-cell>
          <table:table-cell table:style-name="ce11" office:value-type="string" calcext:value-type="string">
            <text:p>赤</text:p>
          </table:table-cell>
          <table:table-cell table:style-name="ce11" table:formula="of:=VLOOKUP([.N52];[$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52];[$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52];[$特性番号.$A$1:$特性番号.$B$8];2;0);0)" office:value-type="float" office:value="0" calcext:value-type="float">
            <text:p>0</text:p>
          </table:table-cell>
          <table:table-cell table:style-name="ce11" office:value-type="string" calcext:value-type="string">
            <text:p>執筆 - ハイケイが戦場に置かれるたび、そのハイケイのレベル以下のレベルを持つ墓地のマホウ1つを指定して発動できる。それを手札に戻す。</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5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2.png</text:p>
          </table:table-cell>
          <table:table-cell table:style-name="ce11" table:formula="of:=CONCATENATE([$JSON.$A$1];[.$C52];[$JSON.$B$1];[.$E52];[$JSON.$C$1];[.F52];[$JSON.$D$1];[.$G52];[$JSON.$E$1];IF(ISNA([.$T52]);&quot;null&quot;;&quot;&quot;&quot;&quot;&amp;[.$T52]&amp;&quot;&quot;&quot;&quot;);[$JSON.$F$1];[.$V52];[$JSON.$G$1];IF(ISNA([.$X52]);&quot;null&quot;;&quot;&quot;&quot;&quot;&amp;[.$X52]&amp;&quot;&quot;&quot;&quot;);[$JSON.$H$1];[.$AA52];[$JSON.$I$1];[.$I52];[$JSON.$J$1];[.K52];[$JSON.$K$1];[.$M52];[$JSON.$L$1];[.$P52];[$JSON.$M$1];[.$O52];[$JSON.$N$1];[.$S52];[$JSON.$O$1];[.$U52];[$JSON.$P$1];IF(ISNA([.$W52]);&quot;null&quot;;[.$W52]);[$JSON.$Q$1];[.$Y52];[$JSON.$R$1];IF([.$Z52];&quot;true&quot;;&quot;false&quot;);[$JSON.$S$1];[.$A52];[$JSON.$T$1];[.$B52];[$JSON.$U$1])" office:value-type="string" office:string-value="{&quot;id&quot;:&quot;1-12&quot;,&quot;name&quot;:&quot;藤原頼通&quot;,&quot;displayName&quot;:&quot;藤原頼通&quot;,&quot;kana&quot;:&quot;ふじわらのよりみち&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rarity&quot;:1,&quot;type&quot;:1,&quot;level&quot;:3,&quot;color&quot;:1,&quot;term&quot;:2,&quot;trait&quot;:0,&quot;power&quot;:3000,&quot;legacy&quot;:4,&quot;anyNumCopies&quot;:false,&quot;orderTable&quot;:51,&quot;orderDeck&quot;:84}," calcext:value-type="string">
            <text:p>{"id":"1-12","name":"藤原頼通","displayName":"藤原頼通","kana":"ふじわらのよりみち","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rarity":1,"type":1,"level":3,"color":1,"term":2,"trait":0,"power":3000,"legacy":4,"anyNumCopies":false,"orderTable":51,"orderDeck":84},</text:p>
          </table:table-cell>
          <table:table-cell table:number-columns-repeated="16356"/>
        </table:table-row>
        <table:table-row table:style-name="ro2">
          <table:table-cell table:style-name="ce11" office:value-type="float" office:value="52" calcext:value-type="float">
            <text:p>52</text:p>
          </table:table-cell>
          <table:table-cell table:style-name="ce11" office:value-type="float" office:value="85" calcext:value-type="float">
            <text:p>85</text:p>
          </table:table-cell>
          <table:table-cell table:style-name="ce21" office:value-type="string" calcext:value-type="string">
            <text:p>1-13</text:p>
          </table:table-cell>
          <table:table-cell table:style-name="ce21" office:value-type="float" office:value="13" calcext:value-type="float">
            <text:p>13</text:p>
          </table:table-cell>
          <table:table-cell table:style-name="ce11" office:value-type="string" calcext:value-type="string">
            <text:p>北条政子</text:p>
          </table:table-cell>
          <table:table-cell table:style-name="ce11" table:formula="of:=[.E53]" office:value-type="string" office:string-value="北条政子" calcext:value-type="string">
            <text:p>北条政子</text:p>
          </table:table-cell>
          <table:table-cell table:style-name="ce11" office:value-type="string" calcext:value-type="string">
            <text:p>ほうじょうまさこ</text:p>
          </table:table-cell>
          <table:table-cell table:style-name="ce11" office:value-type="string" calcext:value-type="string">
            <text:p>第１弾ブースターパック</text:p>
          </table:table-cell>
          <table:table-cell table:style-name="ce11" table:formula="of:=VLOOKUP([.H53];[$収録番号.$A$1:$収録番号.$B$10];2;0)" office:value-type="float" office:value="15" calcext:value-type="float">
            <text:p>15</text:p>
          </table:table-cell>
          <table:table-cell table:style-name="ce11" office:value-type="string" calcext:value-type="string">
            <text:p>R</text:p>
          </table:table-cell>
          <table:table-cell table:style-name="ce11" table:formula="of:=VLOOKUP([.J5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3];[$種類番号.$A$1:$種類番号.$B$4];2;0)" office:value-type="float" office:value="1" calcext:value-type="float">
            <text:p>1</text:p>
          </table:table-cell>
          <table:table-cell table:style-name="ce11" office:value-type="string" calcext:value-type="string">
            <text:p>赤</text:p>
          </table:table-cell>
          <table:table-cell table:style-name="ce11" table:formula="of:=VLOOKUP([.N53];[$色番号.$A$1:$色番号.$B$5];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53];[$特性番号.$A$1:$特性番号.$B$8];2;0);0)" office:value-type="float" office:value="0" calcext:value-type="float">
            <text:p>0</text:p>
          </table:table-cell>
          <table:table-cell table:style-name="ce11"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5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3.png</text:p>
          </table:table-cell>
          <table:table-cell table:style-name="ce11" table:formula="of:=CONCATENATE([$JSON.$A$1];[.$C53];[$JSON.$B$1];[.$E53];[$JSON.$C$1];[.F53];[$JSON.$D$1];[.$G53];[$JSON.$E$1];IF(ISNA([.$T53]);&quot;null&quot;;&quot;&quot;&quot;&quot;&amp;[.$T53]&amp;&quot;&quot;&quot;&quot;);[$JSON.$F$1];[.$V53];[$JSON.$G$1];IF(ISNA([.$X53]);&quot;null&quot;;&quot;&quot;&quot;&quot;&amp;[.$X53]&amp;&quot;&quot;&quot;&quot;);[$JSON.$H$1];[.$AA53];[$JSON.$I$1];[.$I53];[$JSON.$J$1];[.K53];[$JSON.$K$1];[.$M53];[$JSON.$L$1];[.$P53];[$JSON.$M$1];[.$O53];[$JSON.$N$1];[.$S53];[$JSON.$O$1];[.$U53];[$JSON.$P$1];IF(ISNA([.$W53]);&quot;null&quot;;[.$W53]);[$JSON.$Q$1];[.$Y53];[$JSON.$R$1];IF([.$Z53];&quot;true&quot;;&quot;false&quot;);[$JSON.$S$1];[.$A53];[$JSON.$T$1];[.$B53];[$JSON.$U$1])" office:value-type="string" office:string-value="{&quot;id&quot;:&quot;1-13&quot;,&quot;name&quot;:&quot;北条政子&quot;,&quot;displayName&quot;:&quot;北条政子&quot;,&quot;kana&quot;:&quot;ほうじょうまさこ&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rarity&quot;:2,&quot;type&quot;:1,&quot;level&quot;:3,&quot;color&quot;:1,&quot;term&quot;:0,&quot;trait&quot;:0,&quot;power&quot;:2000,&quot;legacy&quot;:0,&quot;anyNumCopies&quot;:false,&quot;orderTable&quot;:52,&quot;orderDeck&quot;:85}," calcext:value-type="string">
            <text:p>{"id":"1-13","name":"北条政子","displayName":"北条政子","kana":"ほうじょうまさこ","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rarity":2,"type":1,"level":3,"color":1,"term":0,"trait":0,"power":2000,"legacy":0,"anyNumCopies":false,"orderTable":52,"orderDeck":85},</text:p>
          </table:table-cell>
          <table:table-cell table:number-columns-repeated="16356"/>
        </table:table-row>
        <table:table-row table:style-name="ro2">
          <table:table-cell table:style-name="ce11" office:value-type="float" office:value="53" calcext:value-type="float">
            <text:p>53</text:p>
          </table:table-cell>
          <table:table-cell table:style-name="ce11" office:value-type="float" office:value="137" calcext:value-type="float">
            <text:p>137</text:p>
          </table:table-cell>
          <table:table-cell table:style-name="ce21" office:value-type="string" calcext:value-type="string">
            <text:p>1-14</text:p>
          </table:table-cell>
          <table:table-cell table:style-name="ce21" office:value-type="float" office:value="14" calcext:value-type="float">
            <text:p>14</text:p>
          </table:table-cell>
          <table:table-cell table:style-name="ce11" office:value-type="string" calcext:value-type="string">
            <text:p>ジョージ・アームストロング・カスター</text:p>
          </table:table-cell>
          <table:table-cell table:style-name="ce11" table:formula="of:=[.E54]" office:value-type="string" office:string-value="ジョージ・アームストロング・カスター" calcext:value-type="string">
            <text:p>ジョージ・アームストロング・カスター</text:p>
          </table:table-cell>
          <table:table-cell table:style-name="ce11" office:value-type="string" calcext:value-type="string">
            <text:p>じょーじあーむすとろんぐかすたー</text:p>
          </table:table-cell>
          <table:table-cell table:style-name="ce11" office:value-type="string" calcext:value-type="string">
            <text:p>第１弾ブースターパック</text:p>
          </table:table-cell>
          <table:table-cell table:style-name="ce11" table:formula="of:=VLOOKUP([.H54];[$収録番号.$A$1:$収録番号.$B$10];2;0)" office:value-type="float" office:value="15" calcext:value-type="float">
            <text:p>15</text:p>
          </table:table-cell>
          <table:table-cell table:style-name="ce11" office:value-type="string" calcext:value-type="string">
            <text:p>N</text:p>
          </table:table-cell>
          <table:table-cell table:style-name="ce11" table:formula="of:=VLOOKUP([.J5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4];[$種類番号.$A$1:$種類番号.$B$4];2;0)" office:value-type="float" office:value="1" calcext:value-type="float">
            <text:p>1</text:p>
          </table:table-cell>
          <table:table-cell table:style-name="ce11" office:value-type="string" calcext:value-type="string">
            <text:p>赤</text:p>
          </table:table-cell>
          <table:table-cell table:style-name="ce11" table:formula="of:=VLOOKUP([.N54];[$色番号.$A$1:$色番号.$B$5];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54];[$特性番号.$A$1:$特性番号.$B$8];2;0);0)" office:value-type="float" office:value="0" calcext:value-type="float">
            <text:p>0</text:p>
          </table:table-cell>
          <table:table-cell table:style-name="ce11" office:value-type="string" calcext:value-type="string">
            <text:p>即応¶これが戦場にいる間「即応」を持つ自分の戦場のイジンは「アタック+1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5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4.png</text:p>
          </table:table-cell>
          <table:table-cell table:style-name="ce11" table:formula="of:=CONCATENATE([$JSON.$A$1];[.$C54];[$JSON.$B$1];[.$E54];[$JSON.$C$1];[.F54];[$JSON.$D$1];[.$G54];[$JSON.$E$1];IF(ISNA([.$T54]);&quot;null&quot;;&quot;&quot;&quot;&quot;&amp;[.$T54]&amp;&quot;&quot;&quot;&quot;);[$JSON.$F$1];[.$V54];[$JSON.$G$1];IF(ISNA([.$X54]);&quot;null&quot;;&quot;&quot;&quot;&quot;&amp;[.$X54]&amp;&quot;&quot;&quot;&quot;);[$JSON.$H$1];[.$AA54];[$JSON.$I$1];[.$I54];[$JSON.$J$1];[.K54];[$JSON.$K$1];[.$M54];[$JSON.$L$1];[.$P54];[$JSON.$M$1];[.$O54];[$JSON.$N$1];[.$S54];[$JSON.$O$1];[.$U54];[$JSON.$P$1];IF(ISNA([.$W54]);&quot;null&quot;;[.$W54]);[$JSON.$Q$1];[.$Y54];[$JSON.$R$1];IF([.$Z54];&quot;true&quot;;&quot;false&quot;);[$JSON.$S$1];[.$A54];[$JSON.$T$1];[.$B54];[$JSON.$U$1])" office:value-type="string" office:string-value="{&quot;id&quot;:&quot;1-14&quot;,&quot;name&quot;:&quot;ジョージ・アームストロング・カスター&quot;,&quot;displayName&quot;:&quot;ジョージ・アームストロング・カスター&quot;,&quot;kana&quot;:&quot;じょーじあーむすとろんぐかすた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rarity&quot;:1,&quot;type&quot;:1,&quot;level&quot;:4,&quot;color&quot;:1,&quot;term&quot;:0,&quot;trait&quot;:0,&quot;power&quot;:2000,&quot;legacy&quot;:4,&quot;anyNumCopies&quot;:false,&quot;orderTable&quot;:53,&quot;orderDeck&quot;:137}," calcext:value-type="string">
            <text:p>{"id":"1-14","name":"ジョージ・アームストロング・カスター","displayName":"ジョージ・アームストロング・カスター","kana":"じょーじあーむすとろんぐかすたー","traitText":null,"ruleText":"即応¶これが戦場にいる間「即応」を持つ自分の戦場のイジンは「アタック+1000」を得る。","legacyText":"1ドローする","imageUrl":"https://one-draw.jp/ijinden/cardlist/001/card/01_014.png","expansion":15,"rarity":1,"type":1,"level":4,"color":1,"term":0,"trait":0,"power":2000,"legacy":4,"anyNumCopies":false,"orderTable":53,"orderDeck":137},</text:p>
          </table:table-cell>
          <table:table-cell table:number-columns-repeated="16356"/>
        </table:table-row>
        <table:table-row table:style-name="ro2">
          <table:table-cell table:style-name="ce11" office:value-type="float" office:value="54" calcext:value-type="float">
            <text:p>54</text:p>
          </table:table-cell>
          <table:table-cell table:style-name="ce11" office:value-type="float" office:value="138" calcext:value-type="float">
            <text:p>138</text:p>
          </table:table-cell>
          <table:table-cell table:style-name="ce21" office:value-type="string" calcext:value-type="string">
            <text:p>1-15</text:p>
          </table:table-cell>
          <table:table-cell table:style-name="ce21" office:value-type="float" office:value="15" calcext:value-type="float">
            <text:p>15</text:p>
          </table:table-cell>
          <table:table-cell table:style-name="ce11" office:value-type="string" calcext:value-type="string">
            <text:p>中臣鎌足</text:p>
          </table:table-cell>
          <table:table-cell table:style-name="ce11" table:formula="of:=[.E55]" office:value-type="string" office:string-value="中臣鎌足" calcext:value-type="string">
            <text:p>中臣鎌足</text:p>
          </table:table-cell>
          <table:table-cell table:style-name="ce11" office:value-type="string" calcext:value-type="string">
            <text:p>なかとみのかまたり</text:p>
          </table:table-cell>
          <table:table-cell table:style-name="ce11" office:value-type="string" calcext:value-type="string">
            <text:p>第１弾ブースターパック</text:p>
          </table:table-cell>
          <table:table-cell table:style-name="ce11" table:formula="of:=VLOOKUP([.H55];[$収録番号.$A$1:$収録番号.$B$10];2;0)" office:value-type="float" office:value="15" calcext:value-type="float">
            <text:p>15</text:p>
          </table:table-cell>
          <table:table-cell table:style-name="ce11" office:value-type="string" calcext:value-type="string">
            <text:p>R</text:p>
          </table:table-cell>
          <table:table-cell table:style-name="ce11" table:formula="of:=VLOOKUP([.J5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5];[$種類番号.$A$1:$種類番号.$B$4];2;0)" office:value-type="float" office:value="1" calcext:value-type="float">
            <text:p>1</text:p>
          </table:table-cell>
          <table:table-cell table:style-name="ce11" office:value-type="string" calcext:value-type="string">
            <text:p>赤</text:p>
          </table:table-cell>
          <table:table-cell table:style-name="ce11" table:formula="of:=VLOOKUP([.N55];[$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55];[$特性番号.$A$1:$特性番号.$B$8];2;0);0)" office:value-type="float" office:value="0" calcext:value-type="float">
            <text:p>0</text:p>
          </table:table-cell>
          <table:table-cell table:style-name="ce11" office:value-type="string" calcext:value-type="string">
            <text:p>戦場に置かれたとき、自分の山札の上から5枚を墓地に置いて発動できる。このターンの間「即応」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5.png</text:p>
          </table:table-cell>
          <table:table-cell table:style-name="ce11" table:formula="of:=CONCATENATE([$JSON.$A$1];[.$C55];[$JSON.$B$1];[.$E55];[$JSON.$C$1];[.F55];[$JSON.$D$1];[.$G55];[$JSON.$E$1];IF(ISNA([.$T55]);&quot;null&quot;;&quot;&quot;&quot;&quot;&amp;[.$T55]&amp;&quot;&quot;&quot;&quot;);[$JSON.$F$1];[.$V55];[$JSON.$G$1];IF(ISNA([.$X55]);&quot;null&quot;;&quot;&quot;&quot;&quot;&amp;[.$X55]&amp;&quot;&quot;&quot;&quot;);[$JSON.$H$1];[.$AA55];[$JSON.$I$1];[.$I55];[$JSON.$J$1];[.K55];[$JSON.$K$1];[.$M55];[$JSON.$L$1];[.$P55];[$JSON.$M$1];[.$O55];[$JSON.$N$1];[.$S55];[$JSON.$O$1];[.$U55];[$JSON.$P$1];IF(ISNA([.$W55]);&quot;null&quot;;[.$W55]);[$JSON.$Q$1];[.$Y55];[$JSON.$R$1];IF([.$Z55];&quot;true&quot;;&quot;false&quot;);[$JSON.$S$1];[.$A55];[$JSON.$T$1];[.$B55];[$JSON.$U$1])" office:value-type="string" office:string-value="{&quot;id&quot;:&quot;1-15&quot;,&quot;name&quot;:&quot;中臣鎌足&quot;,&quot;displayName&quot;:&quot;中臣鎌足&quot;,&quot;kana&quot;:&quot;なかとみのかまたり&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rarity&quot;:2,&quot;type&quot;:1,&quot;level&quot;:4,&quot;color&quot;:1,&quot;term&quot;:0,&quot;trait&quot;:0,&quot;power&quot;:4000,&quot;legacy&quot;:0,&quot;anyNumCopies&quot;:false,&quot;orderTable&quot;:54,&quot;orderDeck&quot;:138}," calcext:value-type="string">
            <text:p>{"id":"1-15","name":"中臣鎌足","displayName":"中臣鎌足","kana":"なかとみのかまたり","traitText":null,"ruleText":"戦場に置かれたとき、自分の山札の上から5枚を墓地に置いて発動できる。このターンの間「即応」を得る。","legacyText":null,"imageUrl":"https://one-draw.jp/ijinden/cardlist/001/card/01_015.png","expansion":15,"rarity":2,"type":1,"level":4,"color":1,"term":0,"trait":0,"power":4000,"legacy":0,"anyNumCopies":false,"orderTable":54,"orderDeck":138},</text:p>
          </table:table-cell>
          <table:table-cell table:number-columns-repeated="16356"/>
        </table:table-row>
        <table:table-row table:style-name="ro2">
          <table:table-cell table:style-name="ce11" office:value-type="float" office:value="55" calcext:value-type="float">
            <text:p>55</text:p>
          </table:table-cell>
          <table:table-cell table:style-name="ce11" office:value-type="float" office:value="139" calcext:value-type="float">
            <text:p>139</text:p>
          </table:table-cell>
          <table:table-cell table:style-name="ce21" office:value-type="string" calcext:value-type="string">
            <text:p>1-16</text:p>
          </table:table-cell>
          <table:table-cell table:style-name="ce21" office:value-type="float" office:value="16" calcext:value-type="float">
            <text:p>16</text:p>
          </table:table-cell>
          <table:table-cell table:style-name="ce11" office:value-type="string" calcext:value-type="string">
            <text:p>マルクス・アントニウス</text:p>
          </table:table-cell>
          <table:table-cell table:style-name="ce11" table:formula="of:=[.E56]" office:value-type="string" office:string-value="マルクス・アントニウス" calcext:value-type="string">
            <text:p>マルクス・アントニウス</text:p>
          </table:table-cell>
          <table:table-cell table:style-name="ce11" office:value-type="string" calcext:value-type="string">
            <text:p>まるくすあんとにうす</text:p>
          </table:table-cell>
          <table:table-cell table:style-name="ce11" office:value-type="string" calcext:value-type="string">
            <text:p>第１弾ブースターパック</text:p>
          </table:table-cell>
          <table:table-cell table:style-name="ce11" table:formula="of:=VLOOKUP([.H56];[$収録番号.$A$1:$収録番号.$B$10];2;0)" office:value-type="float" office:value="15" calcext:value-type="float">
            <text:p>15</text:p>
          </table:table-cell>
          <table:table-cell table:style-name="ce11" office:value-type="string" calcext:value-type="string">
            <text:p>N</text:p>
          </table:table-cell>
          <table:table-cell table:style-name="ce11" table:formula="of:=VLOOKUP([.J5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6];[$種類番号.$A$1:$種類番号.$B$4];2;0)" office:value-type="float" office:value="1" calcext:value-type="float">
            <text:p>1</text:p>
          </table:table-cell>
          <table:table-cell table:style-name="ce11" office:value-type="string" calcext:value-type="string">
            <text:p>赤</text:p>
          </table:table-cell>
          <table:table-cell table:style-name="ce11" table:formula="of:=VLOOKUP([.N5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56];[$特性番号.$A$1:$特性番号.$B$8];2;0);0)" office:value-type="float" office:value="0" calcext:value-type="float">
            <text:p>0</text:p>
          </table:table-cell>
          <table:table-cell table:style-name="ce11" office:value-type="string" calcext:value-type="string">
            <text:p>戦場に置かれたとき、自分の戦場のガーディアン1体を裏のまま魔力ゾーンに置いて発動できる。イジン召喚権+1する。¶アタック+2000</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5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6.png</text:p>
          </table:table-cell>
          <table:table-cell table:style-name="ce11" table:formula="of:=CONCATENATE([$JSON.$A$1];[.$C56];[$JSON.$B$1];[.$E56];[$JSON.$C$1];[.F56];[$JSON.$D$1];[.$G56];[$JSON.$E$1];IF(ISNA([.$T56]);&quot;null&quot;;&quot;&quot;&quot;&quot;&amp;[.$T56]&amp;&quot;&quot;&quot;&quot;);[$JSON.$F$1];[.$V56];[$JSON.$G$1];IF(ISNA([.$X56]);&quot;null&quot;;&quot;&quot;&quot;&quot;&amp;[.$X56]&amp;&quot;&quot;&quot;&quot;);[$JSON.$H$1];[.$AA56];[$JSON.$I$1];[.$I56];[$JSON.$J$1];[.K56];[$JSON.$K$1];[.$M56];[$JSON.$L$1];[.$P56];[$JSON.$M$1];[.$O56];[$JSON.$N$1];[.$S56];[$JSON.$O$1];[.$U56];[$JSON.$P$1];IF(ISNA([.$W56]);&quot;null&quot;;[.$W56]);[$JSON.$Q$1];[.$Y56];[$JSON.$R$1];IF([.$Z56];&quot;true&quot;;&quot;false&quot;);[$JSON.$S$1];[.$A56];[$JSON.$T$1];[.$B56];[$JSON.$U$1])" office:value-type="string" office:string-value="{&quot;id&quot;:&quot;1-16&quot;,&quot;name&quot;:&quot;マルクス・アントニウス&quot;,&quot;displayName&quot;:&quot;マルクス・アントニウス&quot;,&quot;kana&quot;:&quot;まるくすあんとにうす&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rarity&quot;:1,&quot;type&quot;:1,&quot;level&quot;:4,&quot;color&quot;:1,&quot;term&quot;:0,&quot;trait&quot;:0,&quot;power&quot;:1000,&quot;legacy&quot;:0,&quot;anyNumCopies&quot;:false,&quot;orderTable&quot;:55,&quot;orderDeck&quot;:139}," calcext:value-type="string">
            <text:p>{"id":"1-16","name":"マルクス・アントニウス","displayName":"マルクス・アントニウス","kana":"まるくすあんとにうす","traitText":null,"ruleText":"戦場に置かれたとき、自分の戦場のガーディアン1体を裏のまま魔力ゾーンに置いて発動できる。イジン召喚権+1する。¶アタック+2000","legacyText":null,"imageUrl":"https://one-draw.jp/ijinden/cardlist/001/card/01_016.png","expansion":15,"rarity":1,"type":1,"level":4,"color":1,"term":0,"trait":0,"power":1000,"legacy":0,"anyNumCopies":false,"orderTable":55,"orderDeck":139},</text:p>
          </table:table-cell>
          <table:table-cell table:number-columns-repeated="16356"/>
        </table:table-row>
        <table:table-row table:style-name="ro2">
          <table:table-cell table:style-name="ce11" office:value-type="float" office:value="56" calcext:value-type="float">
            <text:p>56</text:p>
          </table:table-cell>
          <table:table-cell table:style-name="ce11" office:value-type="float" office:value="184" calcext:value-type="float">
            <text:p>184</text:p>
          </table:table-cell>
          <table:table-cell table:style-name="ce21" office:value-type="string" calcext:value-type="string">
            <text:p>1-17</text:p>
          </table:table-cell>
          <table:table-cell table:style-name="ce21" office:value-type="float" office:value="17" calcext:value-type="float">
            <text:p>17</text:p>
          </table:table-cell>
          <table:table-cell table:style-name="ce11" office:value-type="string" calcext:value-type="string">
            <text:p>藤原道長</text:p>
          </table:table-cell>
          <table:table-cell table:style-name="ce11" table:formula="of:=[.E57]" office:value-type="string" office:string-value="藤原道長" calcext:value-type="string">
            <text:p>藤原道長</text:p>
          </table:table-cell>
          <table:table-cell table:style-name="ce11" office:value-type="string" calcext:value-type="string">
            <text:p>ふじわらのみちなが</text:p>
          </table:table-cell>
          <table:table-cell table:style-name="ce11" office:value-type="string" calcext:value-type="string">
            <text:p>第１弾ブースターパック</text:p>
          </table:table-cell>
          <table:table-cell table:style-name="ce11" table:formula="of:=VLOOKUP([.H57];[$収録番号.$A$1:$収録番号.$B$10];2;0)" office:value-type="float" office:value="15" calcext:value-type="float">
            <text:p>15</text:p>
          </table:table-cell>
          <table:table-cell table:style-name="ce11" office:value-type="string" calcext:value-type="string">
            <text:p>N</text:p>
          </table:table-cell>
          <table:table-cell table:style-name="ce11" table:formula="of:=VLOOKUP([.J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7];[$種類番号.$A$1:$種類番号.$B$4];2;0)" office:value-type="float" office:value="1" calcext:value-type="float">
            <text:p>1</text:p>
          </table:table-cell>
          <table:table-cell table:style-name="ce11" office:value-type="string" calcext:value-type="string">
            <text:p>赤</text:p>
          </table:table-cell>
          <table:table-cell table:style-name="ce11" table:formula="of:=VLOOKUP([.N5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57];[$特性番号.$A$1:$特性番号.$B$8];2;0);0)" office:value-type="float" office:value="0" calcext:value-type="float">
            <text:p>0</text:p>
          </table:table-cell>
          <table:table-cell table:style-name="ce11" office:value-type="string" calcext:value-type="string">
            <text:p>戦場に置かれたとき、自分の魔力ゾーンのマリョク1色につき、自分の墓地のマホウ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5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7.png</text:p>
          </table:table-cell>
          <table:table-cell table:style-name="ce11" table:formula="of:=CONCATENATE([$JSON.$A$1];[.$C57];[$JSON.$B$1];[.$E57];[$JSON.$C$1];[.F57];[$JSON.$D$1];[.$G57];[$JSON.$E$1];IF(ISNA([.$T57]);&quot;null&quot;;&quot;&quot;&quot;&quot;&amp;[.$T57]&amp;&quot;&quot;&quot;&quot;);[$JSON.$F$1];[.$V57];[$JSON.$G$1];IF(ISNA([.$X57]);&quot;null&quot;;&quot;&quot;&quot;&quot;&amp;[.$X57]&amp;&quot;&quot;&quot;&quot;);[$JSON.$H$1];[.$AA57];[$JSON.$I$1];[.$I57];[$JSON.$J$1];[.K57];[$JSON.$K$1];[.$M57];[$JSON.$L$1];[.$P57];[$JSON.$M$1];[.$O57];[$JSON.$N$1];[.$S57];[$JSON.$O$1];[.$U57];[$JSON.$P$1];IF(ISNA([.$W57]);&quot;null&quot;;[.$W57]);[$JSON.$Q$1];[.$Y57];[$JSON.$R$1];IF([.$Z57];&quot;true&quot;;&quot;false&quot;);[$JSON.$S$1];[.$A57];[$JSON.$T$1];[.$B57];[$JSON.$U$1])" office:value-type="string" office:string-value="{&quot;id&quot;:&quot;1-17&quot;,&quot;name&quot;:&quot;藤原道長&quot;,&quot;displayName&quot;:&quot;藤原道長&quot;,&quot;kana&quot;:&quot;ふじわらのみちなが&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rarity&quot;:1,&quot;type&quot;:1,&quot;level&quot;:5,&quot;color&quot;:1,&quot;term&quot;:0,&quot;trait&quot;:0,&quot;power&quot;:3000,&quot;legacy&quot;:0,&quot;anyNumCopies&quot;:false,&quot;orderTable&quot;:56,&quot;orderDeck&quot;:184}," calcext:value-type="string">
            <text:p>{"id":"1-17","name":"藤原道長","displayName":"藤原道長","kana":"ふじわらのみちなが","traitText":null,"ruleText":"戦場に置かれたとき、自分の魔力ゾーンのマリョク1色につき、自分の墓地のマホウ1つを手札に戻す。","legacyText":null,"imageUrl":"https://one-draw.jp/ijinden/cardlist/001/card/01_017.png","expansion":15,"rarity":1,"type":1,"level":5,"color":1,"term":0,"trait":0,"power":3000,"legacy":0,"anyNumCopies":false,"orderTable":56,"orderDeck":184},</text:p>
          </table:table-cell>
          <table:table-cell table:number-columns-repeated="16356"/>
        </table:table-row>
        <table:table-row table:style-name="ro2">
          <table:table-cell table:style-name="ce11" office:value-type="float" office:value="57" calcext:value-type="float">
            <text:p>57</text:p>
          </table:table-cell>
          <table:table-cell table:style-name="ce11" office:value-type="float" office:value="185" calcext:value-type="float">
            <text:p>185</text:p>
          </table:table-cell>
          <table:table-cell table:style-name="ce21" office:value-type="string" calcext:value-type="string">
            <text:p>1-18</text:p>
          </table:table-cell>
          <table:table-cell table:style-name="ce21" office:value-type="float" office:value="18" calcext:value-type="float">
            <text:p>18</text:p>
          </table:table-cell>
          <table:table-cell table:style-name="ce11" office:value-type="string" calcext:value-type="string">
            <text:p>源頼朝</text:p>
          </table:table-cell>
          <table:table-cell table:style-name="ce11" table:formula="of:=[.E58]" office:value-type="string" office:string-value="源頼朝" calcext:value-type="string">
            <text:p>源頼朝</text:p>
          </table:table-cell>
          <table:table-cell table:style-name="ce11" office:value-type="string" calcext:value-type="string">
            <text:p>みなもとのよりとも</text:p>
          </table:table-cell>
          <table:table-cell table:style-name="ce11" office:value-type="string" calcext:value-type="string">
            <text:p>第１弾ブースターパック</text:p>
          </table:table-cell>
          <table:table-cell table:style-name="ce11" table:formula="of:=VLOOKUP([.H58];[$収録番号.$A$1:$収録番号.$B$10];2;0)" office:value-type="float" office:value="15" calcext:value-type="float">
            <text:p>15</text:p>
          </table:table-cell>
          <table:table-cell table:style-name="ce11" office:value-type="string" calcext:value-type="string">
            <text:p>N</text:p>
          </table:table-cell>
          <table:table-cell table:style-name="ce11" table:formula="of:=VLOOKUP([.J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58];[$種類番号.$A$1:$種類番号.$B$4];2;0)" office:value-type="float" office:value="1" calcext:value-type="float">
            <text:p>1</text:p>
          </table:table-cell>
          <table:table-cell table:style-name="ce11" office:value-type="string" calcext:value-type="string">
            <text:p>赤</text:p>
          </table:table-cell>
          <table:table-cell table:style-name="ce11" table:formula="of:=VLOOKUP([.N58];[$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58];[$特性番号.$A$1:$特性番号.$B$8];2;0);0)" office:value-type="float" office:value="0" calcext:value-type="float">
            <text:p>0</text:p>
          </table:table-cell>
          <table:table-cell table:style-name="ce11" office:value-type="string" calcext:value-type="string">
            <text:p>戦場に置かれたとき、パワー4000以下の相手の戦場のイジン1体を破壊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5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8.png</text:p>
          </table:table-cell>
          <table:table-cell table:style-name="ce11" table:formula="of:=CONCATENATE([$JSON.$A$1];[.$C58];[$JSON.$B$1];[.$E58];[$JSON.$C$1];[.F58];[$JSON.$D$1];[.$G58];[$JSON.$E$1];IF(ISNA([.$T58]);&quot;null&quot;;&quot;&quot;&quot;&quot;&amp;[.$T58]&amp;&quot;&quot;&quot;&quot;);[$JSON.$F$1];[.$V58];[$JSON.$G$1];IF(ISNA([.$X58]);&quot;null&quot;;&quot;&quot;&quot;&quot;&amp;[.$X58]&amp;&quot;&quot;&quot;&quot;);[$JSON.$H$1];[.$AA58];[$JSON.$I$1];[.$I58];[$JSON.$J$1];[.K58];[$JSON.$K$1];[.$M58];[$JSON.$L$1];[.$P58];[$JSON.$M$1];[.$O58];[$JSON.$N$1];[.$S58];[$JSON.$O$1];[.$U58];[$JSON.$P$1];IF(ISNA([.$W58]);&quot;null&quot;;[.$W58]);[$JSON.$Q$1];[.$Y58];[$JSON.$R$1];IF([.$Z58];&quot;true&quot;;&quot;false&quot;);[$JSON.$S$1];[.$A58];[$JSON.$T$1];[.$B58];[$JSON.$U$1])" office:value-type="string" office:string-value="{&quot;id&quot;:&quot;1-18&quot;,&quot;name&quot;:&quot;源頼朝&quot;,&quot;displayName&quot;:&quot;源頼朝&quot;,&quot;kana&quot;:&quot;みなもとのよりとも&quot;,&quot;traitText&quot;:null,&quot;ruleText&quot;:&quot;戦場に置かれたとき、パワー4000以下の相手の戦場のイジン1体を破壊する。&quot;,&quot;legacyText&quot;:null,&quot;imageUrl&quot;:&quot;https://one-draw.jp/ijinden/cardlist/001/card/01_018.png&quot;,&quot;expansion&quot;:15,&quot;rarity&quot;:1,&quot;type&quot;:1,&quot;level&quot;:5,&quot;color&quot;:1,&quot;term&quot;:0,&quot;trait&quot;:0,&quot;power&quot;:5000,&quot;legacy&quot;:0,&quot;anyNumCopies&quot;:false,&quot;orderTable&quot;:57,&quot;orderDeck&quot;:185}," calcext:value-type="string">
            <text:p>{"id":"1-18","name":"源頼朝","displayName":"源頼朝","kana":"みなもとのよりとも","traitText":null,"ruleText":"戦場に置かれたとき、パワー4000以下の相手の戦場のイジン1体を破壊する。","legacyText":null,"imageUrl":"https://one-draw.jp/ijinden/cardlist/001/card/01_018.png","expansion":15,"rarity":1,"type":1,"level":5,"color":1,"term":0,"trait":0,"power":5000,"legacy":0,"anyNumCopies":false,"orderTable":57,"orderDeck":185},</text:p>
          </table:table-cell>
          <table:table-cell table:number-columns-repeated="16356"/>
        </table:table-row>
        <table:table-row table:style-name="ro2">
          <table:table-cell table:style-name="ce11" office:value-type="float" office:value="58" calcext:value-type="float">
            <text:p>58</text:p>
          </table:table-cell>
          <table:table-cell table:style-name="ce11" office:value-type="float" office:value="258" calcext:value-type="float">
            <text:p>258</text:p>
          </table:table-cell>
          <table:table-cell table:style-name="ce21" office:value-type="string" calcext:value-type="string">
            <text:p>1-19</text:p>
          </table:table-cell>
          <table:table-cell table:style-name="ce21" office:value-type="float" office:value="19" calcext:value-type="float">
            <text:p>19</text:p>
          </table:table-cell>
          <table:table-cell table:style-name="ce11" office:value-type="string" calcext:value-type="string">
            <text:p>ガイウス・ユリウス・カエサル</text:p>
          </table:table-cell>
          <table:table-cell table:style-name="ce11" table:formula="of:=[.E59]" office:value-type="string" office:string-value="ガイウス・ユリウス・カエサル" calcext:value-type="string">
            <text:p>ガイウス・ユリウス・カエサル</text:p>
          </table:table-cell>
          <table:table-cell table:style-name="ce11" office:value-type="string" calcext:value-type="string">
            <text:p>がいうすゆりうすかえさる</text:p>
          </table:table-cell>
          <table:table-cell table:style-name="ce11" office:value-type="string" calcext:value-type="string">
            <text:p>第１弾ブースターパック</text:p>
          </table:table-cell>
          <table:table-cell table:style-name="ce11" table:formula="of:=VLOOKUP([.H59];[$収録番号.$A$1:$収録番号.$B$10];2;0)" office:value-type="float" office:value="15" calcext:value-type="float">
            <text:p>15</text:p>
          </table:table-cell>
          <table:table-cell table:style-name="ce11" office:value-type="string" calcext:value-type="string">
            <text:p>R</text:p>
          </table:table-cell>
          <table:table-cell table:style-name="ce11" table:formula="of:=VLOOKUP([.J5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59];[$種類番号.$A$1:$種類番号.$B$4];2;0)" office:value-type="float" office:value="1" calcext:value-type="float">
            <text:p>1</text:p>
          </table:table-cell>
          <table:table-cell table:style-name="ce11" office:value-type="string" calcext:value-type="string">
            <text:p>赤</text:p>
          </table:table-cell>
          <table:table-cell table:style-name="ce11" table:formula="of:=VLOOKUP([.N59];[$色番号.$A$1:$色番号.$B$10];2;0)" office:value-type="float" office:value="1" calcext:value-type="float">
            <text:p>1</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59];[$特性番号.$A$1:$特性番号.$B$8];2;0);0)" office:value-type="float" office:value="0" calcext:value-type="float">
            <text:p>0</text:p>
          </table:table-cell>
          <table:table-cell table:style-name="ce11" office:value-type="string" calcext:value-type="string">
            <text:p>トリプルプレッシャー¶戦場に置かれたとき、相手の手札が6枚以上なら発動する。このターンの間「即応」を得る。</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5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19.png</text:p>
          </table:table-cell>
          <table:table-cell table:style-name="ce11" table:formula="of:=CONCATENATE([$JSON.$A$1];[.$C59];[$JSON.$B$1];[.$E59];[$JSON.$C$1];[.F59];[$JSON.$D$1];[.$G59];[$JSON.$E$1];IF(ISNA([.$T59]);&quot;null&quot;;&quot;&quot;&quot;&quot;&amp;[.$T59]&amp;&quot;&quot;&quot;&quot;);[$JSON.$F$1];[.$V59];[$JSON.$G$1];IF(ISNA([.$X59]);&quot;null&quot;;&quot;&quot;&quot;&quot;&amp;[.$X59]&amp;&quot;&quot;&quot;&quot;);[$JSON.$H$1];[.$AA59];[$JSON.$I$1];[.$I59];[$JSON.$J$1];[.K59];[$JSON.$K$1];[.$M59];[$JSON.$L$1];[.$P59];[$JSON.$M$1];[.$O59];[$JSON.$N$1];[.$S59];[$JSON.$O$1];[.$U59];[$JSON.$P$1];IF(ISNA([.$W59]);&quot;null&quot;;[.$W59]);[$JSON.$Q$1];[.$Y59];[$JSON.$R$1];IF([.$Z59];&quot;true&quot;;&quot;false&quot;);[$JSON.$S$1];[.$A59];[$JSON.$T$1];[.$B59];[$JSON.$U$1])" office:value-type="string" office:string-value="{&quot;id&quot;:&quot;1-19&quot;,&quot;name&quot;:&quot;ガイウス・ユリウス・カエサル&quot;,&quot;displayName&quot;:&quot;ガイウス・ユリウス・カエサル&quot;,&quot;kana&quot;:&quot;がいうすゆりうすかえさる&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rarity&quot;:2,&quot;type&quot;:1,&quot;level&quot;:7,&quot;color&quot;:1,&quot;term&quot;:0,&quot;trait&quot;:0,&quot;power&quot;:6000,&quot;legacy&quot;:0,&quot;anyNumCopies&quot;:false,&quot;orderTable&quot;:58,&quot;orderDeck&quot;:258}," calcext:value-type="string">
            <text:p>{"id":"1-19","name":"ガイウス・ユリウス・カエサル","displayName":"ガイウス・ユリウス・カエサル","kana":"がいうすゆりうすかえさる","traitText":null,"ruleText":"トリプルプレッシャー¶戦場に置かれたとき、相手の手札が6枚以上なら発動する。このターンの間「即応」を得る。","legacyText":null,"imageUrl":"https://one-draw.jp/ijinden/cardlist/001/card/01_019.png","expansion":15,"rarity":2,"type":1,"level":7,"color":1,"term":0,"trait":0,"power":6000,"legacy":0,"anyNumCopies":false,"orderTable":58,"orderDeck":258},</text:p>
          </table:table-cell>
          <table:table-cell table:number-columns-repeated="16356"/>
        </table:table-row>
        <table:table-row table:style-name="ro2">
          <table:table-cell table:style-name="ce11" office:value-type="float" office:value="59" calcext:value-type="float">
            <text:p>59</text:p>
          </table:table-cell>
          <table:table-cell table:style-name="ce11" office:value-type="float" office:value="8" calcext:value-type="float">
            <text:p>8</text:p>
          </table:table-cell>
          <table:table-cell table:style-name="ce21" office:value-type="string" calcext:value-type="string">
            <text:p>1-20</text:p>
          </table:table-cell>
          <table:table-cell table:style-name="ce21" office:value-type="float" office:value="20" calcext:value-type="float">
            <text:p>20</text:p>
          </table:table-cell>
          <table:table-cell table:style-name="ce11" office:value-type="string" calcext:value-type="string">
            <text:p>ハンス・アクセル・フォン・フェルセン</text:p>
          </table:table-cell>
          <table:table-cell table:style-name="ce11" table:formula="of:=[.E60]" office:value-type="string" office:string-value="ハンス・アクセル・フォン・フェルセン" calcext:value-type="string">
            <text:p>ハンス・アクセル・フォン・フェルセン</text:p>
          </table:table-cell>
          <table:table-cell table:style-name="ce11" office:value-type="string" calcext:value-type="string">
            <text:p>はんすあくせるふぉんふぇるせん</text:p>
          </table:table-cell>
          <table:table-cell table:style-name="ce11" office:value-type="string" calcext:value-type="string">
            <text:p>第１弾ブースターパック</text:p>
          </table:table-cell>
          <table:table-cell table:style-name="ce11" table:formula="of:=VLOOKUP([.H60];[$収録番号.$A$1:$収録番号.$B$10];2;0)" office:value-type="float" office:value="15" calcext:value-type="float">
            <text:p>15</text:p>
          </table:table-cell>
          <table:table-cell table:style-name="ce11" office:value-type="string" calcext:value-type="string">
            <text:p>N</text:p>
          </table:table-cell>
          <table:table-cell table:style-name="ce11" table:formula="of:=VLOOKUP([.J6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0];[$種類番号.$A$1:$種類番号.$B$4];2;0)" office:value-type="float" office:value="1" calcext:value-type="float">
            <text:p>1</text:p>
          </table:table-cell>
          <table:table-cell table:style-name="ce11" office:value-type="string" calcext:value-type="string">
            <text:p>青</text:p>
          </table:table-cell>
          <table:table-cell table:style-name="ce11" table:formula="of:=VLOOKUP([.N60];[$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60];[$特性番号.$A$1:$特性番号.$B$8];2;0);0)" office:value-type="float" office:value="0" calcext:value-type="float">
            <text:p>0</text:p>
          </table:table-cell>
          <table:table-cell table:style-name="ce11" office:value-type="string" calcext:value-type="string">
            <text:p>ブロッカーになったとき、1ドローする。¶相手の戦場の「即応」を持つイジンがアタッカーになったとき、これを起こす。</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6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0.png</text:p>
          </table:table-cell>
          <table:table-cell table:style-name="ce11" table:formula="of:=CONCATENATE([$JSON.$A$1];[.$C60];[$JSON.$B$1];[.$E60];[$JSON.$C$1];[.F60];[$JSON.$D$1];[.$G60];[$JSON.$E$1];IF(ISNA([.$T60]);&quot;null&quot;;&quot;&quot;&quot;&quot;&amp;[.$T60]&amp;&quot;&quot;&quot;&quot;);[$JSON.$F$1];[.$V60];[$JSON.$G$1];IF(ISNA([.$X60]);&quot;null&quot;;&quot;&quot;&quot;&quot;&amp;[.$X60]&amp;&quot;&quot;&quot;&quot;);[$JSON.$H$1];[.$AA60];[$JSON.$I$1];[.$I60];[$JSON.$J$1];[.K60];[$JSON.$K$1];[.$M60];[$JSON.$L$1];[.$P60];[$JSON.$M$1];[.$O60];[$JSON.$N$1];[.$S60];[$JSON.$O$1];[.$U60];[$JSON.$P$1];IF(ISNA([.$W60]);&quot;null&quot;;[.$W60]);[$JSON.$Q$1];[.$Y60];[$JSON.$R$1];IF([.$Z60];&quot;true&quot;;&quot;false&quot;);[$JSON.$S$1];[.$A60];[$JSON.$T$1];[.$B60];[$JSON.$U$1])" office:value-type="string" office:string-value="{&quot;id&quot;:&quot;1-20&quot;,&quot;name&quot;:&quot;ハンス・アクセル・フォン・フェルセン&quot;,&quot;displayName&quot;:&quot;ハンス・アクセル・フォン・フェルセン&quot;,&quot;kana&quot;:&quot;はんすあくせるふぉんふぇるせん&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rarity&quot;:1,&quot;type&quot;:1,&quot;level&quot;:1,&quot;color&quot;:2,&quot;term&quot;:0,&quot;trait&quot;:0,&quot;power&quot;:1000,&quot;legacy&quot;:4,&quot;anyNumCopies&quot;:false,&quot;orderTable&quot;:59,&quot;orderDeck&quot;:8}," calcext:value-type="string">
            <text:p>{"id":"1-20","name":"ハンス・アクセル・フォン・フェルセン","displayName":"ハンス・アクセル・フォン・フェルセン","kana":"はんすあくせるふぉんふぇるせん","traitText":null,"ruleText":"ブロッカーになったとき、1ドローする。¶相手の戦場の「即応」を持つイジンがアタッカーになったとき、これを起こす。","legacyText":"1ドローする","imageUrl":"https://one-draw.jp/ijinden/cardlist/001/card/01_020.png","expansion":15,"rarity":1,"type":1,"level":1,"color":2,"term":0,"trait":0,"power":1000,"legacy":4,"anyNumCopies":false,"orderTable":59,"orderDeck":8},</text:p>
          </table:table-cell>
          <table:table-cell table:number-columns-repeated="16356"/>
        </table:table-row>
        <table:table-row table:style-name="ro2">
          <table:table-cell table:style-name="ce11" office:value-type="float" office:value="60" calcext:value-type="float">
            <text:p>60</text:p>
          </table:table-cell>
          <table:table-cell table:style-name="ce11" office:value-type="float" office:value="43" calcext:value-type="float">
            <text:p>43</text:p>
          </table:table-cell>
          <table:table-cell table:style-name="ce21" office:value-type="string" calcext:value-type="string">
            <text:p>1-21</text:p>
          </table:table-cell>
          <table:table-cell table:style-name="ce21" office:value-type="float" office:value="21" calcext:value-type="float">
            <text:p>21</text:p>
          </table:table-cell>
          <table:table-cell table:style-name="ce11" office:value-type="string" calcext:value-type="string">
            <text:p>鑑真</text:p>
          </table:table-cell>
          <table:table-cell table:style-name="ce11" table:formula="of:=[.E61]" office:value-type="string" office:string-value="鑑真" calcext:value-type="string">
            <text:p>鑑真</text:p>
          </table:table-cell>
          <table:table-cell table:style-name="ce11" office:value-type="string" calcext:value-type="string">
            <text:p>がんじん</text:p>
          </table:table-cell>
          <table:table-cell table:style-name="ce11" office:value-type="string" calcext:value-type="string">
            <text:p>第１弾ブースターパック</text:p>
          </table:table-cell>
          <table:table-cell table:style-name="ce11" table:formula="of:=VLOOKUP([.H61];[$収録番号.$A$1:$収録番号.$B$10];2;0)" office:value-type="float" office:value="15" calcext:value-type="float">
            <text:p>15</text:p>
          </table:table-cell>
          <table:table-cell table:style-name="ce11" office:value-type="string" calcext:value-type="string">
            <text:p>N</text:p>
          </table:table-cell>
          <table:table-cell table:style-name="ce11" table:formula="of:=VLOOKUP([.J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1];[$種類番号.$A$1:$種類番号.$B$4];2;0)" office:value-type="float" office:value="1" calcext:value-type="float">
            <text:p>1</text:p>
          </table:table-cell>
          <table:table-cell table:style-name="ce11" office:value-type="string" calcext:value-type="string">
            <text:p>青</text:p>
          </table:table-cell>
          <table:table-cell table:style-name="ce11" table:formula="of:=VLOOKUP([.N6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61];[$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61];[$特性番号.$A$1:$特性番号.$B$8];2;0);0)" office:value-type="float" office:value="0" calcext:value-type="float">
            <text:p>0</text:p>
          </table:table-cell>
          <table:table-cell table:style-name="ce11" office:value-type="string" calcext:value-type="string">
            <text:p>航海 - アタッカーになったとき、1ドローして、これを破壊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6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1.png</text:p>
          </table:table-cell>
          <table:table-cell table:style-name="ce11" table:formula="of:=CONCATENATE([$JSON.$A$1];[.$C61];[$JSON.$B$1];[.$E61];[$JSON.$C$1];[.F61];[$JSON.$D$1];[.$G61];[$JSON.$E$1];IF(ISNA([.$T61]);&quot;null&quot;;&quot;&quot;&quot;&quot;&amp;[.$T61]&amp;&quot;&quot;&quot;&quot;);[$JSON.$F$1];[.$V61];[$JSON.$G$1];IF(ISNA([.$X61]);&quot;null&quot;;&quot;&quot;&quot;&quot;&amp;[.$X61]&amp;&quot;&quot;&quot;&quot;);[$JSON.$H$1];[.$AA61];[$JSON.$I$1];[.$I61];[$JSON.$J$1];[.K61];[$JSON.$K$1];[.$M61];[$JSON.$L$1];[.$P61];[$JSON.$M$1];[.$O61];[$JSON.$N$1];[.$S61];[$JSON.$O$1];[.$U61];[$JSON.$P$1];IF(ISNA([.$W61]);&quot;null&quot;;[.$W61]);[$JSON.$Q$1];[.$Y61];[$JSON.$R$1];IF([.$Z61];&quot;true&quot;;&quot;false&quot;);[$JSON.$S$1];[.$A61];[$JSON.$T$1];[.$B61];[$JSON.$U$1])" office:value-type="string" office:string-value="{&quot;id&quot;:&quot;1-21&quot;,&quot;name&quot;:&quot;鑑真&quot;,&quot;displayName&quot;:&quot;鑑真&quot;,&quot;kana&quot;:&quot;がんじん&quot;,&quot;traitText&quot;:null,&quot;ruleText&quot;:&quot;航海 - アタッカーになったとき、1ドローして、これを破壊する。&quot;,&quot;legacyText&quot;:&quot;1ドローする&quot;,&quot;imageUrl&quot;:&quot;https://one-draw.jp/ijinden/cardlist/001/card/01_021.png&quot;,&quot;expansion&quot;:15,&quot;rarity&quot;:1,&quot;type&quot;:1,&quot;level&quot;:2,&quot;color&quot;:2,&quot;term&quot;:1,&quot;trait&quot;:0,&quot;power&quot;:2000,&quot;legacy&quot;:4,&quot;anyNumCopies&quot;:false,&quot;orderTable&quot;:60,&quot;orderDeck&quot;:43}," calcext:value-type="string">
            <text:p>{"id":"1-21","name":"鑑真","displayName":"鑑真","kana":"がんじん","traitText":null,"ruleText":"航海 - アタッカーになったとき、1ドローして、これを破壊する。","legacyText":"1ドローする","imageUrl":"https://one-draw.jp/ijinden/cardlist/001/card/01_021.png","expansion":15,"rarity":1,"type":1,"level":2,"color":2,"term":1,"trait":0,"power":2000,"legacy":4,"anyNumCopies":false,"orderTable":60,"orderDeck":43},</text:p>
          </table:table-cell>
          <table:table-cell table:number-columns-repeated="16356"/>
        </table:table-row>
        <table:table-row table:style-name="ro2">
          <table:table-cell table:style-name="ce11" office:value-type="float" office:value="61" calcext:value-type="float">
            <text:p>61</text:p>
          </table:table-cell>
          <table:table-cell table:style-name="ce11" office:value-type="float" office:value="44" calcext:value-type="float">
            <text:p>44</text:p>
          </table:table-cell>
          <table:table-cell table:style-name="ce21" office:value-type="string" calcext:value-type="string">
            <text:p>1-22</text:p>
          </table:table-cell>
          <table:table-cell table:style-name="ce21" office:value-type="float" office:value="22" calcext:value-type="float">
            <text:p>22</text:p>
          </table:table-cell>
          <table:table-cell table:style-name="ce11" office:value-type="string" calcext:value-type="string">
            <text:p>ジャンヌ・ダルク</text:p>
          </table:table-cell>
          <table:table-cell table:style-name="ce11" table:formula="of:=[.E62]" office:value-type="string" office:string-value="ジャンヌ・ダルク" calcext:value-type="string">
            <text:p>ジャンヌ・ダルク</text:p>
          </table:table-cell>
          <table:table-cell table:style-name="ce11" office:value-type="string" calcext:value-type="string">
            <text:p>じゃんぬだるく</text:p>
          </table:table-cell>
          <table:table-cell table:style-name="ce11" office:value-type="string" calcext:value-type="string">
            <text:p>第１弾ブースターパック</text:p>
          </table:table-cell>
          <table:table-cell table:style-name="ce11" table:formula="of:=VLOOKUP([.H62];[$収録番号.$A$1:$収録番号.$B$10];2;0)" office:value-type="float" office:value="15" calcext:value-type="float">
            <text:p>15</text:p>
          </table:table-cell>
          <table:table-cell table:style-name="ce11" office:value-type="string" calcext:value-type="string">
            <text:p>N</text:p>
          </table:table-cell>
          <table:table-cell table:style-name="ce11" table:formula="of:=VLOOKUP([.J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2];[$種類番号.$A$1:$種類番号.$B$4];2;0)" office:value-type="float" office:value="1" calcext:value-type="float">
            <text:p>1</text:p>
          </table:table-cell>
          <table:table-cell table:style-name="ce11" office:value-type="string" calcext:value-type="string">
            <text:p>青</text:p>
          </table:table-cell>
          <table:table-cell table:style-name="ce11" table:formula="of:=VLOOKUP([.N62];[$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62];[$特性番号.$A$1:$特性番号.$B$8];2;0);0)" office:value-type="float" office:value="0" calcext:value-type="float">
            <text:p>0</text:p>
          </table:table-cell>
          <table:table-cell table:style-name="ce11" office:value-type="string" calcext:value-type="string">
            <text:p>戦場に置かれたとき、自分の山札の上から3枚を墓地に置く。¶破壊されたとき、自分の手札1枚を墓地に置く。</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6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2.png</text:p>
          </table:table-cell>
          <table:table-cell table:style-name="ce11" table:formula="of:=CONCATENATE([$JSON.$A$1];[.$C62];[$JSON.$B$1];[.$E62];[$JSON.$C$1];[.F62];[$JSON.$D$1];[.$G62];[$JSON.$E$1];IF(ISNA([.$T62]);&quot;null&quot;;&quot;&quot;&quot;&quot;&amp;[.$T62]&amp;&quot;&quot;&quot;&quot;);[$JSON.$F$1];[.$V62];[$JSON.$G$1];IF(ISNA([.$X62]);&quot;null&quot;;&quot;&quot;&quot;&quot;&amp;[.$X62]&amp;&quot;&quot;&quot;&quot;);[$JSON.$H$1];[.$AA62];[$JSON.$I$1];[.$I62];[$JSON.$J$1];[.K62];[$JSON.$K$1];[.$M62];[$JSON.$L$1];[.$P62];[$JSON.$M$1];[.$O62];[$JSON.$N$1];[.$S62];[$JSON.$O$1];[.$U62];[$JSON.$P$1];IF(ISNA([.$W62]);&quot;null&quot;;[.$W62]);[$JSON.$Q$1];[.$Y62];[$JSON.$R$1];IF([.$Z62];&quot;true&quot;;&quot;false&quot;);[$JSON.$S$1];[.$A62];[$JSON.$T$1];[.$B62];[$JSON.$U$1])" office:value-type="string" office:string-value="{&quot;id&quot;:&quot;1-22&quot;,&quot;name&quot;:&quot;ジャンヌ・ダルク&quot;,&quot;displayName&quot;:&quot;ジャンヌ・ダルク&quot;,&quot;kana&quot;:&quot;じゃんぬだるく&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rarity&quot;:1,&quot;type&quot;:1,&quot;level&quot;:2,&quot;color&quot;:2,&quot;term&quot;:0,&quot;trait&quot;:0,&quot;power&quot;:3000,&quot;legacy&quot;:1,&quot;anyNumCopies&quot;:false,&quot;orderTable&quot;:61,&quot;orderDeck&quot;:44}," calcext:value-type="string">
            <text:p>{"id":"1-22","name":"ジャンヌ・ダルク","displayName":"ジャンヌ・ダルク","kana":"じゃんぬだるく","traitText":null,"ruleText":"戦場に置かれたとき、自分の山札の上から3枚を墓地に置く。¶破壊されたとき、自分の手札1枚を墓地に置く。","legacyText":"魔力化","imageUrl":"https://one-draw.jp/ijinden/cardlist/001/card/01_022.png","expansion":15,"rarity":1,"type":1,"level":2,"color":2,"term":0,"trait":0,"power":3000,"legacy":1,"anyNumCopies":false,"orderTable":61,"orderDeck":44},</text:p>
          </table:table-cell>
          <table:table-cell table:number-columns-repeated="16356"/>
        </table:table-row>
        <table:table-row table:style-name="ro2">
          <table:table-cell table:style-name="ce11" office:value-type="float" office:value="62" calcext:value-type="float">
            <text:p>62</text:p>
          </table:table-cell>
          <table:table-cell table:style-name="ce11" office:value-type="float" office:value="45" calcext:value-type="float">
            <text:p>45</text:p>
          </table:table-cell>
          <table:table-cell table:style-name="ce21" office:value-type="string" calcext:value-type="string">
            <text:p>1-23</text:p>
          </table:table-cell>
          <table:table-cell table:style-name="ce21" office:value-type="float" office:value="23" calcext:value-type="float">
            <text:p>23</text:p>
          </table:table-cell>
          <table:table-cell table:style-name="ce11" office:value-type="string" calcext:value-type="string">
            <text:p>ドナテッロ</text:p>
          </table:table-cell>
          <table:table-cell table:style-name="ce11" table:formula="of:=[.E63]" office:value-type="string" office:string-value="ドナテッロ" calcext:value-type="string">
            <text:p>ドナテッロ</text:p>
          </table:table-cell>
          <table:table-cell table:style-name="ce11" office:value-type="string" calcext:value-type="string">
            <text:p>どなてっろ</text:p>
          </table:table-cell>
          <table:table-cell table:style-name="ce11" office:value-type="string" calcext:value-type="string">
            <text:p>第１弾ブースターパック</text:p>
          </table:table-cell>
          <table:table-cell table:style-name="ce11" table:formula="of:=VLOOKUP([.H63];[$収録番号.$A$1:$収録番号.$B$10];2;0)" office:value-type="float" office:value="15" calcext:value-type="float">
            <text:p>15</text:p>
          </table:table-cell>
          <table:table-cell table:style-name="ce11" office:value-type="string" calcext:value-type="string">
            <text:p>N</text:p>
          </table:table-cell>
          <table:table-cell table:style-name="ce11" table:formula="of:=VLOOKUP([.J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3];[$種類番号.$A$1:$種類番号.$B$4];2;0)" office:value-type="float" office:value="1" calcext:value-type="float">
            <text:p>1</text:p>
          </table:table-cell>
          <table:table-cell table:style-name="ce11" office:value-type="string" calcext:value-type="string">
            <text:p>青</text:p>
          </table:table-cell>
          <table:table-cell table:style-name="ce11" table:formula="of:=VLOOKUP([.N6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3];[$能力語番号.$A$1:$能力語番号.$B$11];2;0);0)" office:value-type="float" office:value="0" calcext:value-type="float">
            <text:p>0</text:p>
          </table:table-cell>
          <table:table-cell office:value-type="string" calcext:value-type="string">
            <text:p>美術</text:p>
          </table:table-cell>
          <table:table-cell table:style-name="ce11" table:formula="of:=IFERROR(VLOOKUP([.$T63];[$特性番号.$A$1:$特性番号.$B$8];2;0);0)" office:value-type="float" office:value="2" calcext:value-type="float">
            <text:p>2</text:p>
          </table:table-cell>
          <table:table-cell table:style-name="ce11" office:value-type="string" calcext:value-type="string">
            <text:p>戦場に置かれたとき、1ドローして、自分の手札1枚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6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3.png</text:p>
          </table:table-cell>
          <table:table-cell table:style-name="ce11" table:formula="of:=CONCATENATE([$JSON.$A$1];[.$C63];[$JSON.$B$1];[.$E63];[$JSON.$C$1];[.F63];[$JSON.$D$1];[.$G63];[$JSON.$E$1];IF(ISNA([.$T63]);&quot;null&quot;;&quot;&quot;&quot;&quot;&amp;[.$T63]&amp;&quot;&quot;&quot;&quot;);[$JSON.$F$1];[.$V63];[$JSON.$G$1];IF(ISNA([.$X63]);&quot;null&quot;;&quot;&quot;&quot;&quot;&amp;[.$X63]&amp;&quot;&quot;&quot;&quot;);[$JSON.$H$1];[.$AA63];[$JSON.$I$1];[.$I63];[$JSON.$J$1];[.K63];[$JSON.$K$1];[.$M63];[$JSON.$L$1];[.$P63];[$JSON.$M$1];[.$O63];[$JSON.$N$1];[.$S63];[$JSON.$O$1];[.$U63];[$JSON.$P$1];IF(ISNA([.$W63]);&quot;null&quot;;[.$W63]);[$JSON.$Q$1];[.$Y63];[$JSON.$R$1];IF([.$Z63];&quot;true&quot;;&quot;false&quot;);[$JSON.$S$1];[.$A63];[$JSON.$T$1];[.$B63];[$JSON.$U$1])" office:value-type="string" office:string-value="{&quot;id&quot;:&quot;1-23&quot;,&quot;name&quot;:&quot;ドナテッロ&quot;,&quot;displayName&quot;:&quot;ドナテッロ&quot;,&quot;kana&quot;:&quot;どなてっろ&quot;,&quot;traitText&quot;:&quot;美術&quot;,&quot;ruleText&quot;:&quot;戦場に置かれたとき、1ドローして、自分の手札1枚を墓地に置く。&quot;,&quot;legacyText&quot;:&quot;1ドローする&quot;,&quot;imageUrl&quot;:&quot;https://one-draw.jp/ijinden/cardlist/001/card/01_023.png&quot;,&quot;expansion&quot;:15,&quot;rarity&quot;:1,&quot;type&quot;:1,&quot;level&quot;:2,&quot;color&quot;:2,&quot;term&quot;:0,&quot;trait&quot;:2,&quot;power&quot;:2000,&quot;legacy&quot;:4,&quot;anyNumCopies&quot;:false,&quot;orderTable&quot;:62,&quot;orderDeck&quot;:45}," calcext:value-type="string">
            <text:p>{"id":"1-23","name":"ドナテッロ","displayName":"ドナテッロ","kana":"どなてっろ","traitText":"美術","ruleText":"戦場に置かれたとき、1ドローして、自分の手札1枚を墓地に置く。","legacyText":"1ドローする","imageUrl":"https://one-draw.jp/ijinden/cardlist/001/card/01_023.png","expansion":15,"rarity":1,"type":1,"level":2,"color":2,"term":0,"trait":2,"power":2000,"legacy":4,"anyNumCopies":false,"orderTable":62,"orderDeck":45},</text:p>
          </table:table-cell>
          <table:table-cell table:number-columns-repeated="16356"/>
        </table:table-row>
        <table:table-row table:style-name="ro2">
          <table:table-cell table:style-name="ce11" office:value-type="float" office:value="63" calcext:value-type="float">
            <text:p>63</text:p>
          </table:table-cell>
          <table:table-cell table:style-name="ce11" office:value-type="float" office:value="99" calcext:value-type="float">
            <text:p>99</text:p>
          </table:table-cell>
          <table:table-cell table:style-name="ce21" office:value-type="string" calcext:value-type="string">
            <text:p>1-24</text:p>
          </table:table-cell>
          <table:table-cell table:style-name="ce21" office:value-type="float" office:value="24" calcext:value-type="float">
            <text:p>24</text:p>
          </table:table-cell>
          <table:table-cell table:style-name="ce11" office:value-type="string" calcext:value-type="string">
            <text:p>孔子</text:p>
          </table:table-cell>
          <table:table-cell table:style-name="ce11" table:formula="of:=[.E64]" office:value-type="string" office:string-value="孔子" calcext:value-type="string">
            <text:p>孔子</text:p>
          </table:table-cell>
          <table:table-cell table:style-name="ce11" office:value-type="string" calcext:value-type="string">
            <text:p>こうし</text:p>
          </table:table-cell>
          <table:table-cell table:style-name="ce11" office:value-type="string" calcext:value-type="string">
            <text:p>第１弾ブースターパック</text:p>
          </table:table-cell>
          <table:table-cell table:style-name="ce11" table:formula="of:=VLOOKUP([.H64];[$収録番号.$A$1:$収録番号.$B$10];2;0)" office:value-type="float" office:value="15" calcext:value-type="float">
            <text:p>15</text:p>
          </table:table-cell>
          <table:table-cell table:style-name="ce11" office:value-type="string" calcext:value-type="string">
            <text:p>R</text:p>
          </table:table-cell>
          <table:table-cell table:style-name="ce11" table:formula="of:=VLOOKUP([.J6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64];[$種類番号.$A$1:$種類番号.$B$4];2;0)" office:value-type="float" office:value="1" calcext:value-type="float">
            <text:p>1</text:p>
          </table:table-cell>
          <table:table-cell table:style-name="ce11" office:value-type="string" calcext:value-type="string">
            <text:p>青</text:p>
          </table:table-cell>
          <table:table-cell table:style-name="ce11" table:formula="of:=VLOOKUP([.N6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64];[$特性番号.$A$1:$特性番号.$B$8];2;0);0)" office:value-type="float" office:value="0" calcext:value-type="float">
            <text:p>0</text:p>
          </table:table-cell>
          <table:table-cell table:style-name="ce11"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6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4.png</text:p>
          </table:table-cell>
          <table:table-cell table:style-name="ce11" table:formula="of:=CONCATENATE([$JSON.$A$1];[.$C64];[$JSON.$B$1];[.$E64];[$JSON.$C$1];[.F64];[$JSON.$D$1];[.$G64];[$JSON.$E$1];IF(ISNA([.$T64]);&quot;null&quot;;&quot;&quot;&quot;&quot;&amp;[.$T64]&amp;&quot;&quot;&quot;&quot;);[$JSON.$F$1];[.$V64];[$JSON.$G$1];IF(ISNA([.$X64]);&quot;null&quot;;&quot;&quot;&quot;&quot;&amp;[.$X64]&amp;&quot;&quot;&quot;&quot;);[$JSON.$H$1];[.$AA64];[$JSON.$I$1];[.$I64];[$JSON.$J$1];[.K64];[$JSON.$K$1];[.$M64];[$JSON.$L$1];[.$P64];[$JSON.$M$1];[.$O64];[$JSON.$N$1];[.$S64];[$JSON.$O$1];[.$U64];[$JSON.$P$1];IF(ISNA([.$W64]);&quot;null&quot;;[.$W64]);[$JSON.$Q$1];[.$Y64];[$JSON.$R$1];IF([.$Z64];&quot;true&quot;;&quot;false&quot;);[$JSON.$S$1];[.$A64];[$JSON.$T$1];[.$B64];[$JSON.$U$1])" office:value-type="string" office:string-value="{&quot;id&quot;:&quot;1-24&quot;,&quot;name&quot;:&quot;孔子&quot;,&quot;displayName&quot;:&quot;孔子&quot;,&quot;kana&quot;:&quot;こうし&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rarity&quot;:2,&quot;type&quot;:1,&quot;level&quot;:3,&quot;color&quot;:2,&quot;term&quot;:0,&quot;trait&quot;:0,&quot;power&quot;:1000,&quot;legacy&quot;:4,&quot;anyNumCopies&quot;:false,&quot;orderTable&quot;:63,&quot;orderDeck&quot;:99}," calcext:value-type="string">
            <text:p>{"id":"1-24","name":"孔子","displayName":"孔子","kana":"こうし","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rarity":2,"type":1,"level":3,"color":2,"term":0,"trait":0,"power":1000,"legacy":4,"anyNumCopies":false,"orderTable":63,"orderDeck":99},</text:p>
          </table:table-cell>
          <table:table-cell table:number-columns-repeated="16356"/>
        </table:table-row>
        <table:table-row table:style-name="ro2">
          <table:table-cell table:style-name="ce11" office:value-type="float" office:value="64" calcext:value-type="float">
            <text:p>64</text:p>
          </table:table-cell>
          <table:table-cell table:style-name="ce11" office:value-type="float" office:value="196" calcext:value-type="float">
            <text:p>196</text:p>
          </table:table-cell>
          <table:table-cell table:style-name="ce21" office:value-type="string" calcext:value-type="string">
            <text:p>1-25</text:p>
          </table:table-cell>
          <table:table-cell table:style-name="ce21" office:value-type="float" office:value="25" calcext:value-type="float">
            <text:p>25</text:p>
          </table:table-cell>
          <table:table-cell table:style-name="ce11" office:value-type="string" calcext:value-type="string">
            <text:p>始皇帝</text:p>
          </table:table-cell>
          <table:table-cell table:style-name="ce11" table:formula="of:=[.E65]" office:value-type="string" office:string-value="始皇帝" calcext:value-type="string">
            <text:p>始皇帝</text:p>
          </table:table-cell>
          <table:table-cell table:style-name="ce11" office:value-type="string" calcext:value-type="string">
            <text:p>しこうてい</text:p>
          </table:table-cell>
          <table:table-cell table:style-name="ce11" office:value-type="string" calcext:value-type="string">
            <text:p>第１弾ブースターパック</text:p>
          </table:table-cell>
          <table:table-cell table:style-name="ce11" table:formula="of:=VLOOKUP([.H65];[$収録番号.$A$1:$収録番号.$B$10];2;0)" office:value-type="float" office:value="15" calcext:value-type="float">
            <text:p>15</text:p>
          </table:table-cell>
          <table:table-cell table:style-name="ce11" office:value-type="string" calcext:value-type="string">
            <text:p>N</text:p>
          </table:table-cell>
          <table:table-cell table:style-name="ce11" table:formula="of:=VLOOKUP([.J6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5];[$種類番号.$A$1:$種類番号.$B$4];2;0)" office:value-type="float" office:value="1" calcext:value-type="float">
            <text:p>1</text:p>
          </table:table-cell>
          <table:table-cell table:style-name="ce11" office:value-type="string" calcext:value-type="string">
            <text:p>青</text:p>
          </table:table-cell>
          <table:table-cell table:style-name="ce11" table:formula="of:=VLOOKUP([.N65];[$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65];[$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6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5.png</text:p>
          </table:table-cell>
          <table:table-cell table:style-name="ce11" table:formula="of:=CONCATENATE([$JSON.$A$1];[.$C65];[$JSON.$B$1];[.$E65];[$JSON.$C$1];[.F65];[$JSON.$D$1];[.$G65];[$JSON.$E$1];IF(ISNA([.$T65]);&quot;null&quot;;&quot;&quot;&quot;&quot;&amp;[.$T65]&amp;&quot;&quot;&quot;&quot;);[$JSON.$F$1];[.$V65];[$JSON.$G$1];IF(ISNA([.$X65]);&quot;null&quot;;&quot;&quot;&quot;&quot;&amp;[.$X65]&amp;&quot;&quot;&quot;&quot;);[$JSON.$H$1];[.$AA65];[$JSON.$I$1];[.$I65];[$JSON.$J$1];[.K65];[$JSON.$K$1];[.$M65];[$JSON.$L$1];[.$P65];[$JSON.$M$1];[.$O65];[$JSON.$N$1];[.$S65];[$JSON.$O$1];[.$U65];[$JSON.$P$1];IF(ISNA([.$W65]);&quot;null&quot;;[.$W65]);[$JSON.$Q$1];[.$Y65];[$JSON.$R$1];IF([.$Z65];&quot;true&quot;;&quot;false&quot;);[$JSON.$S$1];[.$A65];[$JSON.$T$1];[.$B65];[$JSON.$U$1])" office:value-type="string" office:string-value="{&quot;id&quot;:&quot;1-25&quot;,&quot;name&quot;:&quot;始皇帝&quot;,&quot;displayName&quot;:&quot;始皇帝&quot;,&quot;kana&quot;:&quot;しこうてい&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rarity&quot;:1,&quot;type&quot;:1,&quot;level&quot;:5,&quot;color&quot;:2,&quot;term&quot;:0,&quot;trait&quot;:0,&quot;power&quot;:5000,&quot;legacy&quot;:0,&quot;anyNumCopies&quot;:false,&quot;orderTable&quot;:64,&quot;orderDeck&quot;:196}," calcext:value-type="string">
            <text:p>{"id":"1-25","name":"始皇帝","displayName":"始皇帝","kana":"しこうてい","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rarity":1,"type":1,"level":5,"color":2,"term":0,"trait":0,"power":5000,"legacy":0,"anyNumCopies":false,"orderTable":64,"orderDeck":196},</text:p>
          </table:table-cell>
          <table:table-cell table:number-columns-repeated="16356"/>
        </table:table-row>
        <table:table-row table:style-name="ro2">
          <table:table-cell table:style-name="ce11" office:value-type="float" office:value="65" calcext:value-type="float">
            <text:p>65</text:p>
          </table:table-cell>
          <table:table-cell table:style-name="ce11" office:value-type="float" office:value="100" calcext:value-type="float">
            <text:p>100</text:p>
          </table:table-cell>
          <table:table-cell table:style-name="ce21" office:value-type="string" calcext:value-type="string">
            <text:p>1-26</text:p>
          </table:table-cell>
          <table:table-cell table:style-name="ce21" office:value-type="float" office:value="26" calcext:value-type="float">
            <text:p>26</text:p>
          </table:table-cell>
          <table:table-cell table:style-name="ce11" office:value-type="string" calcext:value-type="string">
            <text:p>メアリー1世</text:p>
          </table:table-cell>
          <table:table-cell table:style-name="ce11" table:formula="of:=[.E66]" office:value-type="string" office:string-value="メアリー1世" calcext:value-type="string">
            <text:p>メアリー1世</text:p>
          </table:table-cell>
          <table:table-cell table:style-name="ce11" office:value-type="string" calcext:value-type="string">
            <text:p>めありーいっせい</text:p>
          </table:table-cell>
          <table:table-cell table:style-name="ce11" office:value-type="string" calcext:value-type="string">
            <text:p>第１弾ブースターパック</text:p>
          </table:table-cell>
          <table:table-cell table:style-name="ce11" table:formula="of:=VLOOKUP([.H66];[$収録番号.$A$1:$収録番号.$B$10];2;0)" office:value-type="float" office:value="15" calcext:value-type="float">
            <text:p>15</text:p>
          </table:table-cell>
          <table:table-cell table:style-name="ce11" office:value-type="string" calcext:value-type="string">
            <text:p>N</text:p>
          </table:table-cell>
          <table:table-cell table:style-name="ce11" table:formula="of:=VLOOKUP([.J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6];[$種類番号.$A$1:$種類番号.$B$4];2;0)" office:value-type="float" office:value="1" calcext:value-type="float">
            <text:p>1</text:p>
          </table:table-cell>
          <table:table-cell table:style-name="ce11" office:value-type="string" calcext:value-type="string">
            <text:p>青</text:p>
          </table:table-cell>
          <table:table-cell table:style-name="ce11" table:formula="of:=VLOOKUP([.N66];[$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66];[$特性番号.$A$1:$特性番号.$B$8];2;0);0)" office:value-type="float" office:value="0" calcext:value-type="float">
            <text:p>0</text:p>
          </table:table-cell>
          <table:table-cell table:style-name="ce11" office:value-type="string" calcext:value-type="string">
            <text:p>戦場に置かれたとき、相手の手札を見てマリョクでないカード1つを墓地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6.png</text:p>
          </table:table-cell>
          <table:table-cell table:style-name="ce11" table:formula="of:=CONCATENATE([$JSON.$A$1];[.$C66];[$JSON.$B$1];[.$E66];[$JSON.$C$1];[.F66];[$JSON.$D$1];[.$G66];[$JSON.$E$1];IF(ISNA([.$T66]);&quot;null&quot;;&quot;&quot;&quot;&quot;&amp;[.$T66]&amp;&quot;&quot;&quot;&quot;);[$JSON.$F$1];[.$V66];[$JSON.$G$1];IF(ISNA([.$X66]);&quot;null&quot;;&quot;&quot;&quot;&quot;&amp;[.$X66]&amp;&quot;&quot;&quot;&quot;);[$JSON.$H$1];[.$AA66];[$JSON.$I$1];[.$I66];[$JSON.$J$1];[.K66];[$JSON.$K$1];[.$M66];[$JSON.$L$1];[.$P66];[$JSON.$M$1];[.$O66];[$JSON.$N$1];[.$S66];[$JSON.$O$1];[.$U66];[$JSON.$P$1];IF(ISNA([.$W66]);&quot;null&quot;;[.$W66]);[$JSON.$Q$1];[.$Y66];[$JSON.$R$1];IF([.$Z66];&quot;true&quot;;&quot;false&quot;);[$JSON.$S$1];[.$A66];[$JSON.$T$1];[.$B66];[$JSON.$U$1])" office:value-type="string" office:string-value="{&quot;id&quot;:&quot;1-26&quot;,&quot;name&quot;:&quot;メアリー1世&quot;,&quot;displayName&quot;:&quot;メアリー1世&quot;,&quot;kana&quot;:&quot;めありーいっせい&quot;,&quot;traitText&quot;:null,&quot;ruleText&quot;:&quot;戦場に置かれたとき、相手の手札を見てマリョクでないカード1つを墓地に置く。&quot;,&quot;legacyText&quot;:null,&quot;imageUrl&quot;:&quot;https://one-draw.jp/ijinden/cardlist/001/card/01_026.png&quot;,&quot;expansion&quot;:15,&quot;rarity&quot;:1,&quot;type&quot;:1,&quot;level&quot;:3,&quot;color&quot;:2,&quot;term&quot;:0,&quot;trait&quot;:0,&quot;power&quot;:1000,&quot;legacy&quot;:0,&quot;anyNumCopies&quot;:false,&quot;orderTable&quot;:65,&quot;orderDeck&quot;:100}," calcext:value-type="string">
            <text:p>{"id":"1-26","name":"メアリー1世","displayName":"メアリー1世","kana":"めありーいっせい","traitText":null,"ruleText":"戦場に置かれたとき、相手の手札を見てマリョクでないカード1つを墓地に置く。","legacyText":null,"imageUrl":"https://one-draw.jp/ijinden/cardlist/001/card/01_026.png","expansion":15,"rarity":1,"type":1,"level":3,"color":2,"term":0,"trait":0,"power":1000,"legacy":0,"anyNumCopies":false,"orderTable":65,"orderDeck":100},</text:p>
          </table:table-cell>
          <table:table-cell table:number-columns-repeated="16356"/>
        </table:table-row>
        <table:table-row table:style-name="ro2">
          <table:table-cell table:style-name="ce11" office:value-type="float" office:value="66" calcext:value-type="float">
            <text:p>66</text:p>
          </table:table-cell>
          <table:table-cell table:style-name="ce11" office:value-type="float" office:value="145" calcext:value-type="float">
            <text:p>145</text:p>
          </table:table-cell>
          <table:table-cell table:style-name="ce21" office:value-type="string" calcext:value-type="string">
            <text:p>1-27</text:p>
          </table:table-cell>
          <table:table-cell table:style-name="ce21" office:value-type="float" office:value="27" calcext:value-type="float">
            <text:p>27</text:p>
          </table:table-cell>
          <table:table-cell table:style-name="ce11" office:value-type="string" calcext:value-type="string">
            <text:p>玄宗</text:p>
          </table:table-cell>
          <table:table-cell table:style-name="ce11" table:formula="of:=[.E67]" office:value-type="string" office:string-value="玄宗" calcext:value-type="string">
            <text:p>玄宗</text:p>
          </table:table-cell>
          <table:table-cell table:style-name="ce11" office:value-type="string" calcext:value-type="string">
            <text:p>げんそう</text:p>
          </table:table-cell>
          <table:table-cell table:style-name="ce11" office:value-type="string" calcext:value-type="string">
            <text:p>第１弾ブースターパック</text:p>
          </table:table-cell>
          <table:table-cell table:style-name="ce11" table:formula="of:=VLOOKUP([.H67];[$収録番号.$A$1:$収録番号.$B$10];2;0)" office:value-type="float" office:value="15" calcext:value-type="float">
            <text:p>15</text:p>
          </table:table-cell>
          <table:table-cell table:style-name="ce11" office:value-type="string" calcext:value-type="string">
            <text:p>N</text:p>
          </table:table-cell>
          <table:table-cell table:style-name="ce11" table:formula="of:=VLOOKUP([.J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7];[$種類番号.$A$1:$種類番号.$B$4];2;0)" office:value-type="float" office:value="1" calcext:value-type="float">
            <text:p>1</text:p>
          </table:table-cell>
          <table:table-cell table:style-name="ce11" office:value-type="string" calcext:value-type="string">
            <text:p>青</text:p>
          </table:table-cell>
          <table:table-cell table:style-name="ce11" table:formula="of:=VLOOKUP([.N67];[$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67];[$特性番号.$A$1:$特性番号.$B$8];2;0);0)" office:value-type="float" office:value="0" calcext:value-type="float">
            <text:p>0</text:p>
          </table:table-cell>
          <table:table-cell table:style-name="ce11"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6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7.png</text:p>
          </table:table-cell>
          <table:table-cell table:style-name="ce11" table:formula="of:=CONCATENATE([$JSON.$A$1];[.$C67];[$JSON.$B$1];[.$E67];[$JSON.$C$1];[.F67];[$JSON.$D$1];[.$G67];[$JSON.$E$1];IF(ISNA([.$T67]);&quot;null&quot;;&quot;&quot;&quot;&quot;&amp;[.$T67]&amp;&quot;&quot;&quot;&quot;);[$JSON.$F$1];[.$V67];[$JSON.$G$1];IF(ISNA([.$X67]);&quot;null&quot;;&quot;&quot;&quot;&quot;&amp;[.$X67]&amp;&quot;&quot;&quot;&quot;);[$JSON.$H$1];[.$AA67];[$JSON.$I$1];[.$I67];[$JSON.$J$1];[.K67];[$JSON.$K$1];[.$M67];[$JSON.$L$1];[.$P67];[$JSON.$M$1];[.$O67];[$JSON.$N$1];[.$S67];[$JSON.$O$1];[.$U67];[$JSON.$P$1];IF(ISNA([.$W67]);&quot;null&quot;;[.$W67]);[$JSON.$Q$1];[.$Y67];[$JSON.$R$1];IF([.$Z67];&quot;true&quot;;&quot;false&quot;);[$JSON.$S$1];[.$A67];[$JSON.$T$1];[.$B67];[$JSON.$U$1])" office:value-type="string" office:string-value="{&quot;id&quot;:&quot;1-27&quot;,&quot;name&quot;:&quot;玄宗&quot;,&quot;displayName&quot;:&quot;玄宗&quot;,&quot;kana&quot;:&quot;げんそう&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rarity&quot;:1,&quot;type&quot;:1,&quot;level&quot;:4,&quot;color&quot;:2,&quot;term&quot;:0,&quot;trait&quot;:0,&quot;power&quot;:2000,&quot;legacy&quot;:0,&quot;anyNumCopies&quot;:false,&quot;orderTable&quot;:66,&quot;orderDeck&quot;:145}," calcext:value-type="string">
            <text:p>{"id":"1-27","name":"玄宗","displayName":"玄宗","kana":"げんそう","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rarity":1,"type":1,"level":4,"color":2,"term":0,"trait":0,"power":2000,"legacy":0,"anyNumCopies":false,"orderTable":66,"orderDeck":145},</text:p>
          </table:table-cell>
          <table:table-cell table:number-columns-repeated="16356"/>
        </table:table-row>
        <table:table-row table:style-name="ro2">
          <table:table-cell table:style-name="ce11" office:value-type="float" office:value="67" calcext:value-type="float">
            <text:p>67</text:p>
          </table:table-cell>
          <table:table-cell table:style-name="ce11" office:value-type="float" office:value="146" calcext:value-type="float">
            <text:p>146</text:p>
          </table:table-cell>
          <table:table-cell table:style-name="ce21" office:value-type="string" calcext:value-type="string">
            <text:p>1-28</text:p>
          </table:table-cell>
          <table:table-cell table:style-name="ce21" office:value-type="float" office:value="28" calcext:value-type="float">
            <text:p>28</text:p>
          </table:table-cell>
          <table:table-cell table:style-name="ce11" office:value-type="string" calcext:value-type="string">
            <text:p>シャルル7世</text:p>
          </table:table-cell>
          <table:table-cell table:style-name="ce11" table:formula="of:=[.E68]" office:value-type="string" office:string-value="シャルル7世" calcext:value-type="string">
            <text:p>シャルル7世</text:p>
          </table:table-cell>
          <table:table-cell table:style-name="ce11" office:value-type="string" calcext:value-type="string">
            <text:p>しゃるるななせい</text:p>
          </table:table-cell>
          <table:table-cell table:style-name="ce11" office:value-type="string" calcext:value-type="string">
            <text:p>第１弾ブースターパック</text:p>
          </table:table-cell>
          <table:table-cell table:style-name="ce11" table:formula="of:=VLOOKUP([.H68];[$収録番号.$A$1:$収録番号.$B$10];2;0)" office:value-type="float" office:value="15" calcext:value-type="float">
            <text:p>15</text:p>
          </table:table-cell>
          <table:table-cell table:style-name="ce11" office:value-type="string" calcext:value-type="string">
            <text:p>N</text:p>
          </table:table-cell>
          <table:table-cell table:style-name="ce11" table:formula="of:=VLOOKUP([.J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68];[$種類番号.$A$1:$種類番号.$B$4];2;0)" office:value-type="float" office:value="1" calcext:value-type="float">
            <text:p>1</text:p>
          </table:table-cell>
          <table:table-cell table:style-name="ce11" office:value-type="string" calcext:value-type="string">
            <text:p>青</text:p>
          </table:table-cell>
          <table:table-cell table:style-name="ce11" table:formula="of:=VLOOKUP([.N68];[$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6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68];[$特性番号.$A$1:$特性番号.$B$8];2;0);0)" office:value-type="float" office:value="0" calcext:value-type="float">
            <text:p>0</text:p>
          </table:table-cell>
          <table:table-cell table:style-name="ce11" office:value-type="string" calcext:value-type="string">
            <text:p>自分の墓地のイジン1体につき「パワー+500」を得る。¶相手の戦場のガーディアンが破壊されるたび、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6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8.png</text:p>
          </table:table-cell>
          <table:table-cell table:style-name="ce11" table:formula="of:=CONCATENATE([$JSON.$A$1];[.$C68];[$JSON.$B$1];[.$E68];[$JSON.$C$1];[.F68];[$JSON.$D$1];[.$G68];[$JSON.$E$1];IF(ISNA([.$T68]);&quot;null&quot;;&quot;&quot;&quot;&quot;&amp;[.$T68]&amp;&quot;&quot;&quot;&quot;);[$JSON.$F$1];[.$V68];[$JSON.$G$1];IF(ISNA([.$X68]);&quot;null&quot;;&quot;&quot;&quot;&quot;&amp;[.$X68]&amp;&quot;&quot;&quot;&quot;);[$JSON.$H$1];[.$AA68];[$JSON.$I$1];[.$I68];[$JSON.$J$1];[.K68];[$JSON.$K$1];[.$M68];[$JSON.$L$1];[.$P68];[$JSON.$M$1];[.$O68];[$JSON.$N$1];[.$S68];[$JSON.$O$1];[.$U68];[$JSON.$P$1];IF(ISNA([.$W68]);&quot;null&quot;;[.$W68]);[$JSON.$Q$1];[.$Y68];[$JSON.$R$1];IF([.$Z68];&quot;true&quot;;&quot;false&quot;);[$JSON.$S$1];[.$A68];[$JSON.$T$1];[.$B68];[$JSON.$U$1])" office:value-type="string" office:string-value="{&quot;id&quot;:&quot;1-28&quot;,&quot;name&quot;:&quot;シャルル7世&quot;,&quot;displayName&quot;:&quot;シャルル7世&quot;,&quot;kana&quot;:&quot;しゃるるななせい&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rarity&quot;:1,&quot;type&quot;:1,&quot;level&quot;:4,&quot;color&quot;:2,&quot;term&quot;:0,&quot;trait&quot;:0,&quot;power&quot;:2000,&quot;legacy&quot;:0,&quot;anyNumCopies&quot;:false,&quot;orderTable&quot;:67,&quot;orderDeck&quot;:146}," calcext:value-type="string">
            <text:p>{"id":"1-28","name":"シャルル7世","displayName":"シャルル7世","kana":"しゃるるななせい","traitText":null,"ruleText":"自分の墓地のイジン1体につき「パワー+500」を得る。¶相手の戦場のガーディアンが破壊されるたび、1ドローする。","legacyText":null,"imageUrl":"https://one-draw.jp/ijinden/cardlist/001/card/01_028.png","expansion":15,"rarity":1,"type":1,"level":4,"color":2,"term":0,"trait":0,"power":2000,"legacy":0,"anyNumCopies":false,"orderTable":67,"orderDeck":146},</text:p>
          </table:table-cell>
          <table:table-cell table:number-columns-repeated="16356"/>
        </table:table-row>
        <table:table-row table:style-name="ro2">
          <table:table-cell table:style-name="ce11" office:value-type="float" office:value="68" calcext:value-type="float">
            <text:p>68</text:p>
          </table:table-cell>
          <table:table-cell table:style-name="ce11" office:value-type="float" office:value="147" calcext:value-type="float">
            <text:p>147</text:p>
          </table:table-cell>
          <table:table-cell table:style-name="ce21" office:value-type="string" calcext:value-type="string">
            <text:p>1-29</text:p>
          </table:table-cell>
          <table:table-cell table:style-name="ce21" office:value-type="float" office:value="29" calcext:value-type="float">
            <text:p>29</text:p>
          </table:table-cell>
          <table:table-cell table:style-name="ce11" office:value-type="string" calcext:value-type="string">
            <text:p>フランシスコ・ザビエル</text:p>
          </table:table-cell>
          <table:table-cell table:style-name="ce11" table:formula="of:=[.E69]" office:value-type="string" office:string-value="フランシスコ・ザビエル" calcext:value-type="string">
            <text:p>フランシスコ・ザビエル</text:p>
          </table:table-cell>
          <table:table-cell table:style-name="ce11" office:value-type="string" calcext:value-type="string">
            <text:p>ふらんしすこざびえる</text:p>
          </table:table-cell>
          <table:table-cell table:style-name="ce11" office:value-type="string" calcext:value-type="string">
            <text:p>第１弾ブースターパック</text:p>
          </table:table-cell>
          <table:table-cell table:style-name="ce11" table:formula="of:=VLOOKUP([.H69];[$収録番号.$A$1:$収録番号.$B$10];2;0)" office:value-type="float" office:value="15" calcext:value-type="float">
            <text:p>15</text:p>
          </table:table-cell>
          <table:table-cell table:style-name="ce11" office:value-type="string" calcext:value-type="string">
            <text:p>R</text:p>
          </table:table-cell>
          <table:table-cell table:style-name="ce11" table:formula="of:=VLOOKUP([.J6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69];[$種類番号.$A$1:$種類番号.$B$4];2;0)" office:value-type="float" office:value="1" calcext:value-type="float">
            <text:p>1</text:p>
          </table:table-cell>
          <table:table-cell table:style-name="ce11" office:value-type="string" calcext:value-type="string">
            <text:p>青</text:p>
          </table:table-cell>
          <table:table-cell table:style-name="ce11" table:formula="of:=VLOOKUP([.N69];[$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69];[$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69];[$特性番号.$A$1:$特性番号.$B$8];2;0);0)" office:value-type="float" office:value="0" calcext:value-type="float">
            <text:p>0</text:p>
          </table:table-cell>
          <table:table-cell table:style-name="ce11" office:value-type="string" calcext:value-type="string">
            <text:p>航海 - アタッカーになったとき、自分の山札の上から1枚をガーディアンにして戦場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6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29.png</text:p>
          </table:table-cell>
          <table:table-cell table:style-name="ce11" table:formula="of:=CONCATENATE([$JSON.$A$1];[.$C69];[$JSON.$B$1];[.$E69];[$JSON.$C$1];[.F69];[$JSON.$D$1];[.$G69];[$JSON.$E$1];IF(ISNA([.$T69]);&quot;null&quot;;&quot;&quot;&quot;&quot;&amp;[.$T69]&amp;&quot;&quot;&quot;&quot;);[$JSON.$F$1];[.$V69];[$JSON.$G$1];IF(ISNA([.$X69]);&quot;null&quot;;&quot;&quot;&quot;&quot;&amp;[.$X69]&amp;&quot;&quot;&quot;&quot;);[$JSON.$H$1];[.$AA69];[$JSON.$I$1];[.$I69];[$JSON.$J$1];[.K69];[$JSON.$K$1];[.$M69];[$JSON.$L$1];[.$P69];[$JSON.$M$1];[.$O69];[$JSON.$N$1];[.$S69];[$JSON.$O$1];[.$U69];[$JSON.$P$1];IF(ISNA([.$W69]);&quot;null&quot;;[.$W69]);[$JSON.$Q$1];[.$Y69];[$JSON.$R$1];IF([.$Z69];&quot;true&quot;;&quot;false&quot;);[$JSON.$S$1];[.$A69];[$JSON.$T$1];[.$B69];[$JSON.$U$1])" office:value-type="string" office:string-value="{&quot;id&quot;:&quot;1-29&quot;,&quot;name&quot;:&quot;フランシスコ・ザビエル&quot;,&quot;displayName&quot;:&quot;フランシスコ・ザビエル&quot;,&quot;kana&quot;:&quot;ふらんしすこざびえる&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rarity&quot;:2,&quot;type&quot;:1,&quot;level&quot;:4,&quot;color&quot;:2,&quot;term&quot;:1,&quot;trait&quot;:0,&quot;power&quot;:1000,&quot;legacy&quot;:0,&quot;anyNumCopies&quot;:false,&quot;orderTable&quot;:68,&quot;orderDeck&quot;:147}," calcext:value-type="string">
            <text:p>{"id":"1-29","name":"フランシスコ・ザビエル","displayName":"フランシスコ・ザビエル","kana":"ふらんしすこざびえる","traitText":null,"ruleText":"航海 - アタッカーになったとき、自分の山札の上から1枚をガーディアンにして戦場に置く。","legacyText":null,"imageUrl":"https://one-draw.jp/ijinden/cardlist/001/card/01_029.png","expansion":15,"rarity":2,"type":1,"level":4,"color":2,"term":1,"trait":0,"power":1000,"legacy":0,"anyNumCopies":false,"orderTable":68,"orderDeck":147},</text:p>
          </table:table-cell>
          <table:table-cell table:number-columns-repeated="16356"/>
        </table:table-row>
        <table:table-row table:style-name="ro2">
          <table:table-cell table:style-name="ce11" office:value-type="float" office:value="69" calcext:value-type="float">
            <text:p>69</text:p>
          </table:table-cell>
          <table:table-cell table:style-name="ce11" office:value-type="float" office:value="197" calcext:value-type="float">
            <text:p>197</text:p>
          </table:table-cell>
          <table:table-cell table:style-name="ce21" office:value-type="string" calcext:value-type="string">
            <text:p>1-30</text:p>
          </table:table-cell>
          <table:table-cell table:style-name="ce21" office:value-type="float" office:value="30" calcext:value-type="float">
            <text:p>30</text:p>
          </table:table-cell>
          <table:table-cell table:style-name="ce11" office:value-type="string" calcext:value-type="string">
            <text:p>チンギス・ハン</text:p>
          </table:table-cell>
          <table:table-cell table:style-name="ce11" table:formula="of:=[.E70]" office:value-type="string" office:string-value="チンギス・ハン" calcext:value-type="string">
            <text:p>チンギス・ハン</text:p>
          </table:table-cell>
          <table:table-cell table:style-name="ce11" office:value-type="string" calcext:value-type="string">
            <text:p>ちんぎすはん</text:p>
          </table:table-cell>
          <table:table-cell table:style-name="ce11" office:value-type="string" calcext:value-type="string">
            <text:p>第１弾ブースターパック</text:p>
          </table:table-cell>
          <table:table-cell table:style-name="ce11" table:formula="of:=VLOOKUP([.H70];[$収録番号.$A$1:$収録番号.$B$10];2;0)" office:value-type="float" office:value="15" calcext:value-type="float">
            <text:p>15</text:p>
          </table:table-cell>
          <table:table-cell table:style-name="ce11" office:value-type="string" calcext:value-type="string">
            <text:p>R</text:p>
          </table:table-cell>
          <table:table-cell table:style-name="ce11" table:formula="of:=VLOOKUP([.J7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70];[$種類番号.$A$1:$種類番号.$B$4];2;0)" office:value-type="float" office:value="1" calcext:value-type="float">
            <text:p>1</text:p>
          </table:table-cell>
          <table:table-cell table:style-name="ce11" office:value-type="string" calcext:value-type="string">
            <text:p>青</text:p>
          </table:table-cell>
          <table:table-cell table:style-name="ce11" table:formula="of:=VLOOKUP([.N70];[$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70];[$特性番号.$A$1:$特性番号.$B$8];2;0);0)" office:value-type="float" office:value="0" calcext:value-type="float">
            <text:p>0</text:p>
          </table:table-cell>
          <table:table-cell table:style-name="ce11" office:value-type="string" calcext:value-type="string">
            <text:p>ダブルプレッシャー¶戦場に置かれたとき、魔力ゾーンの裏のカードすべてをガーディアンにして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0.png</text:p>
          </table:table-cell>
          <table:table-cell table:style-name="ce11" table:formula="of:=CONCATENATE([$JSON.$A$1];[.$C70];[$JSON.$B$1];[.$E70];[$JSON.$C$1];[.F70];[$JSON.$D$1];[.$G70];[$JSON.$E$1];IF(ISNA([.$T70]);&quot;null&quot;;&quot;&quot;&quot;&quot;&amp;[.$T70]&amp;&quot;&quot;&quot;&quot;);[$JSON.$F$1];[.$V70];[$JSON.$G$1];IF(ISNA([.$X70]);&quot;null&quot;;&quot;&quot;&quot;&quot;&amp;[.$X70]&amp;&quot;&quot;&quot;&quot;);[$JSON.$H$1];[.$AA70];[$JSON.$I$1];[.$I70];[$JSON.$J$1];[.K70];[$JSON.$K$1];[.$M70];[$JSON.$L$1];[.$P70];[$JSON.$M$1];[.$O70];[$JSON.$N$1];[.$S70];[$JSON.$O$1];[.$U70];[$JSON.$P$1];IF(ISNA([.$W70]);&quot;null&quot;;[.$W70]);[$JSON.$Q$1];[.$Y70];[$JSON.$R$1];IF([.$Z70];&quot;true&quot;;&quot;false&quot;);[$JSON.$S$1];[.$A70];[$JSON.$T$1];[.$B70];[$JSON.$U$1])" office:value-type="string" office:string-value="{&quot;id&quot;:&quot;1-30&quot;,&quot;name&quot;:&quot;チンギス・ハン&quot;,&quot;displayName&quot;:&quot;チンギス・ハン&quot;,&quot;kana&quot;:&quot;ちんぎすはん&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rarity&quot;:2,&quot;type&quot;:1,&quot;level&quot;:5,&quot;color&quot;:2,&quot;term&quot;:0,&quot;trait&quot;:0,&quot;power&quot;:4000,&quot;legacy&quot;:0,&quot;anyNumCopies&quot;:false,&quot;orderTable&quot;:69,&quot;orderDeck&quot;:197}," calcext:value-type="string">
            <text:p>{"id":"1-30","name":"チンギス・ハン","displayName":"チンギス・ハン","kana":"ちんぎすはん","traitText":null,"ruleText":"ダブルプレッシャー¶戦場に置かれたとき、魔力ゾーンの裏のカードすべてをガーディアンにして戦場に置く。","legacyText":null,"imageUrl":"https://one-draw.jp/ijinden/cardlist/001/card/01_030.png","expansion":15,"rarity":2,"type":1,"level":5,"color":2,"term":0,"trait":0,"power":4000,"legacy":0,"anyNumCopies":false,"orderTable":69,"orderDeck":197},</text:p>
          </table:table-cell>
          <table:table-cell table:number-columns-repeated="16356"/>
        </table:table-row>
        <table:table-row table:style-name="ro2">
          <table:table-cell table:style-name="ce11" office:value-type="float" office:value="70" calcext:value-type="float">
            <text:p>70</text:p>
          </table:table-cell>
          <table:table-cell table:style-name="ce11" office:value-type="float" office:value="198" calcext:value-type="float">
            <text:p>198</text:p>
          </table:table-cell>
          <table:table-cell table:style-name="ce21" office:value-type="string" calcext:value-type="string">
            <text:p>1-31</text:p>
          </table:table-cell>
          <table:table-cell table:style-name="ce21" office:value-type="float" office:value="31" calcext:value-type="float">
            <text:p>31</text:p>
          </table:table-cell>
          <table:table-cell table:style-name="ce11" office:value-type="string" calcext:value-type="string">
            <text:p>ミケランジェロ</text:p>
          </table:table-cell>
          <table:table-cell table:style-name="ce11" table:formula="of:=[.E71]" office:value-type="string" office:string-value="ミケランジェロ" calcext:value-type="string">
            <text:p>ミケランジェロ</text:p>
          </table:table-cell>
          <table:table-cell table:style-name="ce11" office:value-type="string" calcext:value-type="string">
            <text:p>みけらんじぇろ</text:p>
          </table:table-cell>
          <table:table-cell table:style-name="ce11" office:value-type="string" calcext:value-type="string">
            <text:p>第１弾ブースターパック</text:p>
          </table:table-cell>
          <table:table-cell table:style-name="ce11" table:formula="of:=VLOOKUP([.H71];[$収録番号.$A$1:$収録番号.$B$10];2;0)" office:value-type="float" office:value="15" calcext:value-type="float">
            <text:p>15</text:p>
          </table:table-cell>
          <table:table-cell table:style-name="ce11" office:value-type="string" calcext:value-type="string">
            <text:p>N</text:p>
          </table:table-cell>
          <table:table-cell table:style-name="ce11" table:formula="of:=VLOOKUP([.J7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1];[$種類番号.$A$1:$種類番号.$B$4];2;0)" office:value-type="float" office:value="1" calcext:value-type="float">
            <text:p>1</text:p>
          </table:table-cell>
          <table:table-cell table:style-name="ce11" office:value-type="string" calcext:value-type="string">
            <text:p>青</text:p>
          </table:table-cell>
          <table:table-cell table:style-name="ce11" table:formula="of:=VLOOKUP([.N71];[$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1];[$能力語番号.$A$1:$能力語番号.$B$11];2;0);0)" office:value-type="float" office:value="0" calcext:value-type="float">
            <text:p>0</text:p>
          </table:table-cell>
          <table:table-cell office:value-type="string" calcext:value-type="string">
            <text:p>美術</text:p>
          </table:table-cell>
          <table:table-cell table:style-name="ce11" table:formula="of:=IFERROR(VLOOKUP([.$T71];[$特性番号.$A$1:$特性番号.$B$8];2;0);0)" office:value-type="float" office:value="2" calcext:value-type="float">
            <text:p>2</text:p>
          </table:table-cell>
          <table:table-cell table:style-name="ce11" office:value-type="string" calcext:value-type="string">
            <text:p>戦場に置かれたとき、自分の墓地のカード1つをガーディアンにして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1.png</text:p>
          </table:table-cell>
          <table:table-cell table:style-name="ce11" table:formula="of:=CONCATENATE([$JSON.$A$1];[.$C71];[$JSON.$B$1];[.$E71];[$JSON.$C$1];[.F71];[$JSON.$D$1];[.$G71];[$JSON.$E$1];IF(ISNA([.$T71]);&quot;null&quot;;&quot;&quot;&quot;&quot;&amp;[.$T71]&amp;&quot;&quot;&quot;&quot;);[$JSON.$F$1];[.$V71];[$JSON.$G$1];IF(ISNA([.$X71]);&quot;null&quot;;&quot;&quot;&quot;&quot;&amp;[.$X71]&amp;&quot;&quot;&quot;&quot;);[$JSON.$H$1];[.$AA71];[$JSON.$I$1];[.$I71];[$JSON.$J$1];[.K71];[$JSON.$K$1];[.$M71];[$JSON.$L$1];[.$P71];[$JSON.$M$1];[.$O71];[$JSON.$N$1];[.$S71];[$JSON.$O$1];[.$U71];[$JSON.$P$1];IF(ISNA([.$W71]);&quot;null&quot;;[.$W71]);[$JSON.$Q$1];[.$Y71];[$JSON.$R$1];IF([.$Z71];&quot;true&quot;;&quot;false&quot;);[$JSON.$S$1];[.$A71];[$JSON.$T$1];[.$B71];[$JSON.$U$1])" office:value-type="string" office:string-value="{&quot;id&quot;:&quot;1-31&quot;,&quot;name&quot;:&quot;ミケランジェロ&quot;,&quot;displayName&quot;:&quot;ミケランジェロ&quot;,&quot;kana&quot;:&quot;みけらんじぇろ&quot;,&quot;traitText&quot;:&quot;美術&quot;,&quot;ruleText&quot;:&quot;戦場に置かれたとき、自分の墓地のカード1つをガーディアンにして戦場に置く。&quot;,&quot;legacyText&quot;:null,&quot;imageUrl&quot;:&quot;https://one-draw.jp/ijinden/cardlist/001/card/01_031.png&quot;,&quot;expansion&quot;:15,&quot;rarity&quot;:1,&quot;type&quot;:1,&quot;level&quot;:5,&quot;color&quot;:2,&quot;term&quot;:0,&quot;trait&quot;:2,&quot;power&quot;:4000,&quot;legacy&quot;:0,&quot;anyNumCopies&quot;:false,&quot;orderTable&quot;:70,&quot;orderDeck&quot;:198}," calcext:value-type="string">
            <text:p>{"id":"1-31","name":"ミケランジェロ","displayName":"ミケランジェロ","kana":"みけらんじぇろ","traitText":"美術","ruleText":"戦場に置かれたとき、自分の墓地のカード1つをガーディアンにして戦場に置く。","legacyText":null,"imageUrl":"https://one-draw.jp/ijinden/cardlist/001/card/01_031.png","expansion":15,"rarity":1,"type":1,"level":5,"color":2,"term":0,"trait":2,"power":4000,"legacy":0,"anyNumCopies":false,"orderTable":70,"orderDeck":198},</text:p>
          </table:table-cell>
          <table:table-cell table:number-columns-repeated="16356"/>
        </table:table-row>
        <table:table-row table:style-name="ro2">
          <table:table-cell table:style-name="ce11" office:value-type="float" office:value="71" calcext:value-type="float">
            <text:p>71</text:p>
          </table:table-cell>
          <table:table-cell table:style-name="ce11" office:value-type="float" office:value="238" calcext:value-type="float">
            <text:p>238</text:p>
          </table:table-cell>
          <table:table-cell table:style-name="ce21" office:value-type="string" calcext:value-type="string">
            <text:p>1-32</text:p>
          </table:table-cell>
          <table:table-cell table:style-name="ce21" office:value-type="float" office:value="32" calcext:value-type="float">
            <text:p>32</text:p>
          </table:table-cell>
          <table:table-cell table:style-name="ce11" office:value-type="string" calcext:value-type="string">
            <text:p>マリー・アントワネット</text:p>
          </table:table-cell>
          <table:table-cell table:style-name="ce11" table:formula="of:=[.E72]" office:value-type="string" office:string-value="マリー・アントワネット" calcext:value-type="string">
            <text:p>マリー・アントワネット</text:p>
          </table:table-cell>
          <table:table-cell table:style-name="ce11" office:value-type="string" calcext:value-type="string">
            <text:p>まりーあんとわねっと</text:p>
          </table:table-cell>
          <table:table-cell table:style-name="ce11" office:value-type="string" calcext:value-type="string">
            <text:p>第１弾ブースターパック</text:p>
          </table:table-cell>
          <table:table-cell table:style-name="ce11" table:formula="of:=VLOOKUP([.H72];[$収録番号.$A$1:$収録番号.$B$10];2;0)" office:value-type="float" office:value="15" calcext:value-type="float">
            <text:p>15</text:p>
          </table:table-cell>
          <table:table-cell table:style-name="ce11" office:value-type="string" calcext:value-type="string">
            <text:p>N</text:p>
          </table:table-cell>
          <table:table-cell table:style-name="ce11" table:formula="of:=VLOOKUP([.J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2];[$種類番号.$A$1:$種類番号.$B$4];2;0)" office:value-type="float" office:value="1" calcext:value-type="float">
            <text:p>1</text:p>
          </table:table-cell>
          <table:table-cell table:style-name="ce11" office:value-type="string" calcext:value-type="string">
            <text:p>青</text:p>
          </table:table-cell>
          <table:table-cell table:style-name="ce11" table:formula="of:=VLOOKUP([.N72];[$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72];[$特性番号.$A$1:$特性番号.$B$8];2;0);0)" office:value-type="float" office:value="0" calcext:value-type="float">
            <text:p>0</text:p>
          </table:table-cell>
          <table:table-cell table:style-name="ce11" office:value-type="string" calcext:value-type="string">
            <text:p>破壊されたとき、戦場のガーディアンすべてを寝かせ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7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2.png</text:p>
          </table:table-cell>
          <table:table-cell table:style-name="ce11" table:formula="of:=CONCATENATE([$JSON.$A$1];[.$C72];[$JSON.$B$1];[.$E72];[$JSON.$C$1];[.F72];[$JSON.$D$1];[.$G72];[$JSON.$E$1];IF(ISNA([.$T72]);&quot;null&quot;;&quot;&quot;&quot;&quot;&amp;[.$T72]&amp;&quot;&quot;&quot;&quot;);[$JSON.$F$1];[.$V72];[$JSON.$G$1];IF(ISNA([.$X72]);&quot;null&quot;;&quot;&quot;&quot;&quot;&amp;[.$X72]&amp;&quot;&quot;&quot;&quot;);[$JSON.$H$1];[.$AA72];[$JSON.$I$1];[.$I72];[$JSON.$J$1];[.K72];[$JSON.$K$1];[.$M72];[$JSON.$L$1];[.$P72];[$JSON.$M$1];[.$O72];[$JSON.$N$1];[.$S72];[$JSON.$O$1];[.$U72];[$JSON.$P$1];IF(ISNA([.$W72]);&quot;null&quot;;[.$W72]);[$JSON.$Q$1];[.$Y72];[$JSON.$R$1];IF([.$Z72];&quot;true&quot;;&quot;false&quot;);[$JSON.$S$1];[.$A72];[$JSON.$T$1];[.$B72];[$JSON.$U$1])" office:value-type="string" office:string-value="{&quot;id&quot;:&quot;1-32&quot;,&quot;name&quot;:&quot;マリー・アントワネット&quot;,&quot;displayName&quot;:&quot;マリー・アントワネット&quot;,&quot;kana&quot;:&quot;まりーあんとわねっと&quot;,&quot;traitText&quot;:null,&quot;ruleText&quot;:&quot;破壊されたとき、戦場のガーディアンすべてを寝かせる。&quot;,&quot;legacyText&quot;:&quot;魔力化&quot;,&quot;imageUrl&quot;:&quot;https://one-draw.jp/ijinden/cardlist/001/card/01_032.png&quot;,&quot;expansion&quot;:15,&quot;rarity&quot;:1,&quot;type&quot;:1,&quot;level&quot;:6,&quot;color&quot;:2,&quot;term&quot;:0,&quot;trait&quot;:0,&quot;power&quot;:4000,&quot;legacy&quot;:1,&quot;anyNumCopies&quot;:false,&quot;orderTable&quot;:71,&quot;orderDeck&quot;:238}," calcext:value-type="string">
            <text:p>{"id":"1-32","name":"マリー・アントワネット","displayName":"マリー・アントワネット","kana":"まりーあんとわねっと","traitText":null,"ruleText":"破壊されたとき、戦場のガーディアンすべてを寝かせる。","legacyText":"魔力化","imageUrl":"https://one-draw.jp/ijinden/cardlist/001/card/01_032.png","expansion":15,"rarity":1,"type":1,"level":6,"color":2,"term":0,"trait":0,"power":4000,"legacy":1,"anyNumCopies":false,"orderTable":71,"orderDeck":238},</text:p>
          </table:table-cell>
          <table:table-cell table:number-columns-repeated="16356"/>
        </table:table-row>
        <table:table-row table:style-name="ro2">
          <table:table-cell table:style-name="ce11" office:value-type="float" office:value="72" calcext:value-type="float">
            <text:p>72</text:p>
          </table:table-cell>
          <table:table-cell table:style-name="ce11" office:value-type="float" office:value="16" calcext:value-type="float">
            <text:p>16</text:p>
          </table:table-cell>
          <table:table-cell table:style-name="ce21" office:value-type="string" calcext:value-type="string">
            <text:p>1-33</text:p>
          </table:table-cell>
          <table:table-cell table:style-name="ce21" office:value-type="float" office:value="33" calcext:value-type="float">
            <text:p>33</text:p>
          </table:table-cell>
          <table:table-cell table:style-name="ce11" office:value-type="string" calcext:value-type="string">
            <text:p>千利休</text:p>
          </table:table-cell>
          <table:table-cell table:style-name="ce11" table:formula="of:=[.E73]" office:value-type="string" office:string-value="千利休" calcext:value-type="string">
            <text:p>千利休</text:p>
          </table:table-cell>
          <table:table-cell table:style-name="ce11" office:value-type="string" calcext:value-type="string">
            <text:p>せんのりきゅう</text:p>
          </table:table-cell>
          <table:table-cell table:style-name="ce11" office:value-type="string" calcext:value-type="string">
            <text:p>第１弾ブースターパック</text:p>
          </table:table-cell>
          <table:table-cell table:style-name="ce11" table:formula="of:=VLOOKUP([.H73];[$収録番号.$A$1:$収録番号.$B$10];2;0)" office:value-type="float" office:value="15" calcext:value-type="float">
            <text:p>15</text:p>
          </table:table-cell>
          <table:table-cell table:style-name="ce11" office:value-type="string" calcext:value-type="string">
            <text:p>R</text:p>
          </table:table-cell>
          <table:table-cell table:style-name="ce11" table:formula="of:=VLOOKUP([.J7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73];[$種類番号.$A$1:$種類番号.$B$4];2;0)" office:value-type="float" office:value="1" calcext:value-type="float">
            <text:p>1</text:p>
          </table:table-cell>
          <table:table-cell table:style-name="ce11" office:value-type="string" calcext:value-type="string">
            <text:p>緑</text:p>
          </table:table-cell>
          <table:table-cell table:style-name="ce11" table:formula="of:=VLOOKUP([.N73];[$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73];[$特性番号.$A$1:$特性番号.$B$8];2;0);0)" office:value-type="float" office:value="0" calcext:value-type="float">
            <text:p>0</text:p>
          </table:table-cell>
          <table:table-cell table:style-name="ce11"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7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3.png</text:p>
          </table:table-cell>
          <table:table-cell table:style-name="ce11" table:formula="of:=CONCATENATE([$JSON.$A$1];[.$C73];[$JSON.$B$1];[.$E73];[$JSON.$C$1];[.F73];[$JSON.$D$1];[.$G73];[$JSON.$E$1];IF(ISNA([.$T73]);&quot;null&quot;;&quot;&quot;&quot;&quot;&amp;[.$T73]&amp;&quot;&quot;&quot;&quot;);[$JSON.$F$1];[.$V73];[$JSON.$G$1];IF(ISNA([.$X73]);&quot;null&quot;;&quot;&quot;&quot;&quot;&amp;[.$X73]&amp;&quot;&quot;&quot;&quot;);[$JSON.$H$1];[.$AA73];[$JSON.$I$1];[.$I73];[$JSON.$J$1];[.K73];[$JSON.$K$1];[.$M73];[$JSON.$L$1];[.$P73];[$JSON.$M$1];[.$O73];[$JSON.$N$1];[.$S73];[$JSON.$O$1];[.$U73];[$JSON.$P$1];IF(ISNA([.$W73]);&quot;null&quot;;[.$W73]);[$JSON.$Q$1];[.$Y73];[$JSON.$R$1];IF([.$Z73];&quot;true&quot;;&quot;false&quot;);[$JSON.$S$1];[.$A73];[$JSON.$T$1];[.$B73];[$JSON.$U$1])" office:value-type="string" office:string-value="{&quot;id&quot;:&quot;1-33&quot;,&quot;name&quot;:&quot;千利休&quot;,&quot;displayName&quot;:&quot;千利休&quot;,&quot;kana&quot;:&quot;せんのりきゅう&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rarity&quot;:2,&quot;type&quot;:1,&quot;level&quot;:1,&quot;color&quot;:4,&quot;term&quot;:0,&quot;trait&quot;:0,&quot;power&quot;:500,&quot;legacy&quot;:4,&quot;anyNumCopies&quot;:false,&quot;orderTable&quot;:72,&quot;orderDeck&quot;:16}," calcext:value-type="string">
            <text:p>{"id":"1-33","name":"千利休","displayName":"千利休","kana":"せんのりきゅう","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rarity":2,"type":1,"level":1,"color":4,"term":0,"trait":0,"power":500,"legacy":4,"anyNumCopies":false,"orderTable":72,"orderDeck":16},</text:p>
          </table:table-cell>
          <table:table-cell table:number-columns-repeated="16356"/>
        </table:table-row>
        <table:table-row table:style-name="ro2">
          <table:table-cell table:style-name="ce11" office:value-type="float" office:value="73" calcext:value-type="float">
            <text:p>73</text:p>
          </table:table-cell>
          <table:table-cell table:style-name="ce11" office:value-type="float" office:value="57" calcext:value-type="float">
            <text:p>57</text:p>
          </table:table-cell>
          <table:table-cell table:style-name="ce21" office:value-type="string" calcext:value-type="string">
            <text:p>1-34</text:p>
          </table:table-cell>
          <table:table-cell table:style-name="ce21" office:value-type="float" office:value="34" calcext:value-type="float">
            <text:p>34</text:p>
          </table:table-cell>
          <table:table-cell table:style-name="ce11" office:value-type="string" calcext:value-type="string">
            <text:p>狩野永徳</text:p>
          </table:table-cell>
          <table:table-cell table:style-name="ce11" table:formula="of:=[.E74]" office:value-type="string" office:string-value="狩野永徳" calcext:value-type="string">
            <text:p>狩野永徳</text:p>
          </table:table-cell>
          <table:table-cell table:style-name="ce11" office:value-type="string" calcext:value-type="string">
            <text:p>かのうえいとく</text:p>
          </table:table-cell>
          <table:table-cell table:style-name="ce11" office:value-type="string" calcext:value-type="string">
            <text:p>第１弾ブースターパック</text:p>
          </table:table-cell>
          <table:table-cell table:style-name="ce11" table:formula="of:=VLOOKUP([.H74];[$収録番号.$A$1:$収録番号.$B$10];2;0)" office:value-type="float" office:value="15" calcext:value-type="float">
            <text:p>15</text:p>
          </table:table-cell>
          <table:table-cell table:style-name="ce11" office:value-type="string" calcext:value-type="string">
            <text:p>N</text:p>
          </table:table-cell>
          <table:table-cell table:style-name="ce11" table:formula="of:=VLOOKUP([.J7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4];[$種類番号.$A$1:$種類番号.$B$4];2;0)" office:value-type="float" office:value="1" calcext:value-type="float">
            <text:p>1</text:p>
          </table:table-cell>
          <table:table-cell table:style-name="ce11" office:value-type="string" calcext:value-type="string">
            <text:p>緑</text:p>
          </table:table-cell>
          <table:table-cell table:style-name="ce11" table:formula="of:=VLOOKUP([.N74];[$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4];[$能力語番号.$A$1:$能力語番号.$B$11];2;0);0)" office:value-type="float" office:value="0" calcext:value-type="float">
            <text:p>0</text:p>
          </table:table-cell>
          <table:table-cell office:value-type="string" calcext:value-type="string">
            <text:p>美術</text:p>
          </table:table-cell>
          <table:table-cell table:style-name="ce11" table:formula="of:=IFERROR(VLOOKUP([.$T74];[$特性番号.$A$1:$特性番号.$B$8];2;0);0)" office:value-type="float" office:value="2" calcext:value-type="float">
            <text:p>2</text:p>
          </table:table-cell>
          <table:table-cell table:style-name="ce11" office:value-type="string" calcext:value-type="string">
            <text:p>戦場に置かれたとき、戦場に「剣術」イジンがいるなら発動する。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7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4.png</text:p>
          </table:table-cell>
          <table:table-cell table:style-name="ce11" table:formula="of:=CONCATENATE([$JSON.$A$1];[.$C74];[$JSON.$B$1];[.$E74];[$JSON.$C$1];[.F74];[$JSON.$D$1];[.$G74];[$JSON.$E$1];IF(ISNA([.$T74]);&quot;null&quot;;&quot;&quot;&quot;&quot;&amp;[.$T74]&amp;&quot;&quot;&quot;&quot;);[$JSON.$F$1];[.$V74];[$JSON.$G$1];IF(ISNA([.$X74]);&quot;null&quot;;&quot;&quot;&quot;&quot;&amp;[.$X74]&amp;&quot;&quot;&quot;&quot;);[$JSON.$H$1];[.$AA74];[$JSON.$I$1];[.$I74];[$JSON.$J$1];[.K74];[$JSON.$K$1];[.$M74];[$JSON.$L$1];[.$P74];[$JSON.$M$1];[.$O74];[$JSON.$N$1];[.$S74];[$JSON.$O$1];[.$U74];[$JSON.$P$1];IF(ISNA([.$W74]);&quot;null&quot;;[.$W74]);[$JSON.$Q$1];[.$Y74];[$JSON.$R$1];IF([.$Z74];&quot;true&quot;;&quot;false&quot;);[$JSON.$S$1];[.$A74];[$JSON.$T$1];[.$B74];[$JSON.$U$1])" office:value-type="string" office:string-value="{&quot;id&quot;:&quot;1-34&quot;,&quot;name&quot;:&quot;狩野永徳&quot;,&quot;displayName&quot;:&quot;狩野永徳&quot;,&quot;kana&quot;:&quot;かのうえいとく&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rarity&quot;:1,&quot;type&quot;:1,&quot;level&quot;:2,&quot;color&quot;:4,&quot;term&quot;:0,&quot;trait&quot;:2,&quot;power&quot;:2000,&quot;legacy&quot;:4,&quot;anyNumCopies&quot;:false,&quot;orderTable&quot;:73,&quot;orderDeck&quot;:57}," calcext:value-type="string">
            <text:p>{"id":"1-34","name":"狩野永徳","displayName":"狩野永徳","kana":"かのうえいとく","traitText":"美術","ruleText":"戦場に置かれたとき、戦場に「剣術」イジンがいるなら発動する。1ドローする。","legacyText":"1ドローする","imageUrl":"https://one-draw.jp/ijinden/cardlist/001/card/01_034.png","expansion":15,"rarity":1,"type":1,"level":2,"color":4,"term":0,"trait":2,"power":2000,"legacy":4,"anyNumCopies":false,"orderTable":73,"orderDeck":57},</text:p>
          </table:table-cell>
          <table:table-cell table:number-columns-repeated="16356"/>
        </table:table-row>
        <table:table-row table:style-name="ro2">
          <table:table-cell table:style-name="ce11" office:value-type="float" office:value="74" calcext:value-type="float">
            <text:p>74</text:p>
          </table:table-cell>
          <table:table-cell table:style-name="ce11" office:value-type="float" office:value="109" calcext:value-type="float">
            <text:p>109</text:p>
          </table:table-cell>
          <table:table-cell table:style-name="ce21" office:value-type="string" calcext:value-type="string">
            <text:p>1-35</text:p>
          </table:table-cell>
          <table:table-cell table:style-name="ce21" office:value-type="float" office:value="35" calcext:value-type="float">
            <text:p>35</text:p>
          </table:table-cell>
          <table:table-cell table:style-name="ce11" office:value-type="string" calcext:value-type="string">
            <text:p>安倍晴明</text:p>
          </table:table-cell>
          <table:table-cell table:style-name="ce11" table:formula="of:=[.E75]" office:value-type="string" office:string-value="安倍晴明" calcext:value-type="string">
            <text:p>安倍晴明</text:p>
          </table:table-cell>
          <table:table-cell table:style-name="ce11" office:value-type="string" calcext:value-type="string">
            <text:p>あべのせいめい</text:p>
          </table:table-cell>
          <table:table-cell table:style-name="ce11" office:value-type="string" calcext:value-type="string">
            <text:p>第１弾ブースターパック</text:p>
          </table:table-cell>
          <table:table-cell table:style-name="ce11" table:formula="of:=VLOOKUP([.H75];[$収録番号.$A$1:$収録番号.$B$10];2;0)" office:value-type="float" office:value="15" calcext:value-type="float">
            <text:p>15</text:p>
          </table:table-cell>
          <table:table-cell table:style-name="ce11" office:value-type="string" calcext:value-type="string">
            <text:p>N</text:p>
          </table:table-cell>
          <table:table-cell table:style-name="ce11" table:formula="of:=VLOOKUP([.J7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5];[$種類番号.$A$1:$種類番号.$B$4];2;0)" office:value-type="float" office:value="1" calcext:value-type="float">
            <text:p>1</text:p>
          </table:table-cell>
          <table:table-cell table:style-name="ce11" office:value-type="string" calcext:value-type="string">
            <text:p>緑</text:p>
          </table:table-cell>
          <table:table-cell table:style-name="ce11" table:formula="of:=VLOOKUP([.N75];[$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75];[$特性番号.$A$1:$特性番号.$B$8];2;0);0)" office:value-type="float" office:value="0" calcext:value-type="float">
            <text:p>0</text:p>
          </table:table-cell>
          <table:table-cell table:style-name="ce11"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table:style-name="ce11" office:value-type="float" office:value="2000" calcext:value-type="float">
            <text:p>2000</text:p>
          </table:table-cell>
          <table:table-cell table:style-name="ce25" office:value-type="string" calcext:value-type="string">
            <text:p>魔力化</text:p>
          </table:table-cell>
          <table:table-cell table:style-name="ce11" table:formula="of:=IFERROR(VLOOKUP([.$X7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5.png</text:p>
          </table:table-cell>
          <table:table-cell table:style-name="ce11" table:formula="of:=CONCATENATE([$JSON.$A$1];[.$C75];[$JSON.$B$1];[.$E75];[$JSON.$C$1];[.F75];[$JSON.$D$1];[.$G75];[$JSON.$E$1];IF(ISNA([.$T75]);&quot;null&quot;;&quot;&quot;&quot;&quot;&amp;[.$T75]&amp;&quot;&quot;&quot;&quot;);[$JSON.$F$1];[.$V75];[$JSON.$G$1];IF(ISNA([.$X75]);&quot;null&quot;;&quot;&quot;&quot;&quot;&amp;[.$X75]&amp;&quot;&quot;&quot;&quot;);[$JSON.$H$1];[.$AA75];[$JSON.$I$1];[.$I75];[$JSON.$J$1];[.K75];[$JSON.$K$1];[.$M75];[$JSON.$L$1];[.$P75];[$JSON.$M$1];[.$O75];[$JSON.$N$1];[.$S75];[$JSON.$O$1];[.$U75];[$JSON.$P$1];IF(ISNA([.$W75]);&quot;null&quot;;[.$W75]);[$JSON.$Q$1];[.$Y75];[$JSON.$R$1];IF([.$Z75];&quot;true&quot;;&quot;false&quot;);[$JSON.$S$1];[.$A75];[$JSON.$T$1];[.$B75];[$JSON.$U$1])" office:value-type="string" office:string-value="{&quot;id&quot;:&quot;1-35&quot;,&quot;name&quot;:&quot;安倍晴明&quot;,&quot;displayName&quot;:&quot;安倍晴明&quot;,&quot;kana&quot;:&quot;あべのせいめい&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rarity&quot;:1,&quot;type&quot;:1,&quot;level&quot;:3,&quot;color&quot;:4,&quot;term&quot;:0,&quot;trait&quot;:0,&quot;power&quot;:2000,&quot;legacy&quot;:1,&quot;anyNumCopies&quot;:false,&quot;orderTable&quot;:74,&quot;orderDeck&quot;:109}," calcext:value-type="string">
            <text:p>{"id":"1-35","name":"安倍晴明","displayName":"安倍晴明","kana":"あべのせいめい","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rarity":1,"type":1,"level":3,"color":4,"term":0,"trait":0,"power":2000,"legacy":1,"anyNumCopies":false,"orderTable":74,"orderDeck":109},</text:p>
          </table:table-cell>
          <table:table-cell table:number-columns-repeated="16356"/>
        </table:table-row>
        <table:table-row table:style-name="ro2">
          <table:table-cell table:style-name="ce11" office:value-type="float" office:value="75" calcext:value-type="float">
            <text:p>75</text:p>
          </table:table-cell>
          <table:table-cell table:style-name="ce11" office:value-type="float" office:value="110" calcext:value-type="float">
            <text:p>110</text:p>
          </table:table-cell>
          <table:table-cell table:style-name="ce21" office:value-type="string" calcext:value-type="string">
            <text:p>1-36</text:p>
          </table:table-cell>
          <table:table-cell table:style-name="ce21" office:value-type="float" office:value="36" calcext:value-type="float">
            <text:p>36</text:p>
          </table:table-cell>
          <table:table-cell table:style-name="ce11" office:value-type="string" calcext:value-type="string">
            <text:p>吉田兼好</text:p>
          </table:table-cell>
          <table:table-cell table:style-name="ce11" table:formula="of:=[.E76]" office:value-type="string" office:string-value="吉田兼好" calcext:value-type="string">
            <text:p>吉田兼好</text:p>
          </table:table-cell>
          <table:table-cell table:style-name="ce11" office:value-type="string" calcext:value-type="string">
            <text:p>よしだけんこう</text:p>
          </table:table-cell>
          <table:table-cell table:style-name="ce11" office:value-type="string" calcext:value-type="string">
            <text:p>第１弾ブースターパック</text:p>
          </table:table-cell>
          <table:table-cell table:style-name="ce11" table:formula="of:=VLOOKUP([.H76];[$収録番号.$A$1:$収録番号.$B$10];2;0)" office:value-type="float" office:value="15" calcext:value-type="float">
            <text:p>15</text:p>
          </table:table-cell>
          <table:table-cell table:style-name="ce11" office:value-type="string" calcext:value-type="string">
            <text:p>N</text:p>
          </table:table-cell>
          <table:table-cell table:style-name="ce11" table:formula="of:=VLOOKUP([.J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6];[$種類番号.$A$1:$種類番号.$B$4];2;0)" office:value-type="float" office:value="1" calcext:value-type="float">
            <text:p>1</text:p>
          </table:table-cell>
          <table:table-cell table:style-name="ce11" office:value-type="string" calcext:value-type="string">
            <text:p>緑</text:p>
          </table:table-cell>
          <table:table-cell table:style-name="ce11" table:formula="of:=VLOOKUP([.N76];[$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76];[$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76];[$特性番号.$A$1:$特性番号.$B$8];2;0);0)" office:value-type="float" office:value="0" calcext:value-type="float">
            <text:p>0</text:p>
          </table:table-cell>
          <table:table-cell table:style-name="ce11"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7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6.png</text:p>
          </table:table-cell>
          <table:table-cell table:style-name="ce11" table:formula="of:=CONCATENATE([$JSON.$A$1];[.$C76];[$JSON.$B$1];[.$E76];[$JSON.$C$1];[.F76];[$JSON.$D$1];[.$G76];[$JSON.$E$1];IF(ISNA([.$T76]);&quot;null&quot;;&quot;&quot;&quot;&quot;&amp;[.$T76]&amp;&quot;&quot;&quot;&quot;);[$JSON.$F$1];[.$V76];[$JSON.$G$1];IF(ISNA([.$X76]);&quot;null&quot;;&quot;&quot;&quot;&quot;&amp;[.$X76]&amp;&quot;&quot;&quot;&quot;);[$JSON.$H$1];[.$AA76];[$JSON.$I$1];[.$I76];[$JSON.$J$1];[.K76];[$JSON.$K$1];[.$M76];[$JSON.$L$1];[.$P76];[$JSON.$M$1];[.$O76];[$JSON.$N$1];[.$S76];[$JSON.$O$1];[.$U76];[$JSON.$P$1];IF(ISNA([.$W76]);&quot;null&quot;;[.$W76]);[$JSON.$Q$1];[.$Y76];[$JSON.$R$1];IF([.$Z76];&quot;true&quot;;&quot;false&quot;);[$JSON.$S$1];[.$A76];[$JSON.$T$1];[.$B76];[$JSON.$U$1])" office:value-type="string" office:string-value="{&quot;id&quot;:&quot;1-36&quot;,&quot;name&quot;:&quot;吉田兼好&quot;,&quot;displayName&quot;:&quot;吉田兼好&quot;,&quot;kana&quot;:&quot;よしだけんこう&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rarity&quot;:1,&quot;type&quot;:1,&quot;level&quot;:3,&quot;color&quot;:4,&quot;term&quot;:2,&quot;trait&quot;:0,&quot;power&quot;:2000,&quot;legacy&quot;:4,&quot;anyNumCopies&quot;:false,&quot;orderTable&quot;:75,&quot;orderDeck&quot;:110}," calcext:value-type="string">
            <text:p>{"id":"1-36","name":"吉田兼好","displayName":"吉田兼好","kana":"よしだけんこう","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rarity":1,"type":1,"level":3,"color":4,"term":2,"trait":0,"power":2000,"legacy":4,"anyNumCopies":false,"orderTable":75,"orderDeck":110},</text:p>
          </table:table-cell>
          <table:table-cell table:number-columns-repeated="16356"/>
        </table:table-row>
        <table:table-row table:style-name="ro2">
          <table:table-cell table:style-name="ce11" office:value-type="float" office:value="76" calcext:value-type="float">
            <text:p>76</text:p>
          </table:table-cell>
          <table:table-cell table:style-name="ce11" office:value-type="float" office:value="157" calcext:value-type="float">
            <text:p>157</text:p>
          </table:table-cell>
          <table:table-cell table:style-name="ce21" office:value-type="string" calcext:value-type="string">
            <text:p>1-37</text:p>
          </table:table-cell>
          <table:table-cell table:style-name="ce21" office:value-type="float" office:value="37" calcext:value-type="float">
            <text:p>37</text:p>
          </table:table-cell>
          <table:table-cell table:style-name="ce11" office:value-type="string" calcext:value-type="string">
            <text:p>蘆屋道満</text:p>
          </table:table-cell>
          <table:table-cell table:style-name="ce11" table:formula="of:=[.E77]" office:value-type="string" office:string-value="蘆屋道満" calcext:value-type="string">
            <text:p>蘆屋道満</text:p>
          </table:table-cell>
          <table:table-cell table:style-name="ce11" office:value-type="string" calcext:value-type="string">
            <text:p>あしやどうまん</text:p>
          </table:table-cell>
          <table:table-cell table:style-name="ce11" office:value-type="string" calcext:value-type="string">
            <text:p>第１弾ブースターパック</text:p>
          </table:table-cell>
          <table:table-cell table:style-name="ce11" table:formula="of:=VLOOKUP([.H77];[$収録番号.$A$1:$収録番号.$B$10];2;0)" office:value-type="float" office:value="15" calcext:value-type="float">
            <text:p>15</text:p>
          </table:table-cell>
          <table:table-cell table:style-name="ce11" office:value-type="string" calcext:value-type="string">
            <text:p>N</text:p>
          </table:table-cell>
          <table:table-cell table:style-name="ce11" table:formula="of:=VLOOKUP([.J7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7];[$種類番号.$A$1:$種類番号.$B$4];2;0)" office:value-type="float" office:value="1" calcext:value-type="float">
            <text:p>1</text:p>
          </table:table-cell>
          <table:table-cell table:style-name="ce11" office:value-type="string" calcext:value-type="string">
            <text:p>緑</text:p>
          </table:table-cell>
          <table:table-cell table:style-name="ce11" table:formula="of:=VLOOKUP([.N77];[$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77];[$特性番号.$A$1:$特性番号.$B$8];2;0);0)" office:value-type="float" office:value="0" calcext:value-type="float">
            <text:p>0</text:p>
          </table:table-cell>
          <table:table-cell table:style-name="ce11" office:value-type="string" calcext:value-type="string">
            <text:p>ガーディアンが戦場に置かれる際、寝ている状態で戦場に置かれ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7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7.png</text:p>
          </table:table-cell>
          <table:table-cell table:style-name="ce11" table:formula="of:=CONCATENATE([$JSON.$A$1];[.$C77];[$JSON.$B$1];[.$E77];[$JSON.$C$1];[.F77];[$JSON.$D$1];[.$G77];[$JSON.$E$1];IF(ISNA([.$T77]);&quot;null&quot;;&quot;&quot;&quot;&quot;&amp;[.$T77]&amp;&quot;&quot;&quot;&quot;);[$JSON.$F$1];[.$V77];[$JSON.$G$1];IF(ISNA([.$X77]);&quot;null&quot;;&quot;&quot;&quot;&quot;&amp;[.$X77]&amp;&quot;&quot;&quot;&quot;);[$JSON.$H$1];[.$AA77];[$JSON.$I$1];[.$I77];[$JSON.$J$1];[.K77];[$JSON.$K$1];[.$M77];[$JSON.$L$1];[.$P77];[$JSON.$M$1];[.$O77];[$JSON.$N$1];[.$S77];[$JSON.$O$1];[.$U77];[$JSON.$P$1];IF(ISNA([.$W77]);&quot;null&quot;;[.$W77]);[$JSON.$Q$1];[.$Y77];[$JSON.$R$1];IF([.$Z77];&quot;true&quot;;&quot;false&quot;);[$JSON.$S$1];[.$A77];[$JSON.$T$1];[.$B77];[$JSON.$U$1])" office:value-type="string" office:string-value="{&quot;id&quot;:&quot;1-37&quot;,&quot;name&quot;:&quot;蘆屋道満&quot;,&quot;displayName&quot;:&quot;蘆屋道満&quot;,&quot;kana&quot;:&quot;あしやどうまん&quot;,&quot;traitText&quot;:null,&quot;ruleText&quot;:&quot;ガーディアンが戦場に置かれる際、寝ている状態で戦場に置かれる。&quot;,&quot;legacyText&quot;:&quot;魔力化&quot;,&quot;imageUrl&quot;:&quot;https://one-draw.jp/ijinden/cardlist/001/card/01_037.png&quot;,&quot;expansion&quot;:15,&quot;rarity&quot;:1,&quot;type&quot;:1,&quot;level&quot;:4,&quot;color&quot;:4,&quot;term&quot;:0,&quot;trait&quot;:0,&quot;power&quot;:4000,&quot;legacy&quot;:1,&quot;anyNumCopies&quot;:false,&quot;orderTable&quot;:76,&quot;orderDeck&quot;:157}," calcext:value-type="string">
            <text:p>{"id":"1-37","name":"蘆屋道満","displayName":"蘆屋道満","kana":"あしやどうまん","traitText":null,"ruleText":"ガーディアンが戦場に置かれる際、寝ている状態で戦場に置かれる。","legacyText":"魔力化","imageUrl":"https://one-draw.jp/ijinden/cardlist/001/card/01_037.png","expansion":15,"rarity":1,"type":1,"level":4,"color":4,"term":0,"trait":0,"power":4000,"legacy":1,"anyNumCopies":false,"orderTable":76,"orderDeck":157},</text:p>
          </table:table-cell>
          <table:table-cell table:number-columns-repeated="16356"/>
        </table:table-row>
        <table:table-row table:style-name="ro2">
          <table:table-cell table:style-name="ce11" office:value-type="float" office:value="77" calcext:value-type="float">
            <text:p>77</text:p>
          </table:table-cell>
          <table:table-cell table:style-name="ce11" office:value-type="float" office:value="158" calcext:value-type="float">
            <text:p>158</text:p>
          </table:table-cell>
          <table:table-cell table:style-name="ce21" office:value-type="string" calcext:value-type="string">
            <text:p>1-38</text:p>
          </table:table-cell>
          <table:table-cell table:style-name="ce21" office:value-type="float" office:value="38" calcext:value-type="float">
            <text:p>38</text:p>
          </table:table-cell>
          <table:table-cell table:style-name="ce11" office:value-type="string" calcext:value-type="string">
            <text:p>鴨長明</text:p>
          </table:table-cell>
          <table:table-cell table:style-name="ce11" table:formula="of:=[.E78]" office:value-type="string" office:string-value="鴨長明" calcext:value-type="string">
            <text:p>鴨長明</text:p>
          </table:table-cell>
          <table:table-cell table:style-name="ce11" office:value-type="string" calcext:value-type="string">
            <text:p>かものちょうめい</text:p>
          </table:table-cell>
          <table:table-cell table:style-name="ce11" office:value-type="string" calcext:value-type="string">
            <text:p>第１弾ブースターパック</text:p>
          </table:table-cell>
          <table:table-cell table:style-name="ce11" table:formula="of:=VLOOKUP([.H78];[$収録番号.$A$1:$収録番号.$B$10];2;0)" office:value-type="float" office:value="15" calcext:value-type="float">
            <text:p>15</text:p>
          </table:table-cell>
          <table:table-cell table:style-name="ce11" office:value-type="string" calcext:value-type="string">
            <text:p>N</text:p>
          </table:table-cell>
          <table:table-cell table:style-name="ce11" table:formula="of:=VLOOKUP([.J7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8];[$種類番号.$A$1:$種類番号.$B$4];2;0)" office:value-type="float" office:value="1" calcext:value-type="float">
            <text:p>1</text:p>
          </table:table-cell>
          <table:table-cell table:style-name="ce11" office:value-type="string" calcext:value-type="string">
            <text:p>緑</text:p>
          </table:table-cell>
          <table:table-cell table:style-name="ce11" table:formula="of:=VLOOKUP([.N78];[$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78];[$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78];[$特性番号.$A$1:$特性番号.$B$8];2;0);0)" office:value-type="float" office:value="0" calcext:value-type="float">
            <text:p>0</text:p>
          </table:table-cell>
          <table:table-cell table:style-name="ce11"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7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8.png</text:p>
          </table:table-cell>
          <table:table-cell table:style-name="ce11" table:formula="of:=CONCATENATE([$JSON.$A$1];[.$C78];[$JSON.$B$1];[.$E78];[$JSON.$C$1];[.F78];[$JSON.$D$1];[.$G78];[$JSON.$E$1];IF(ISNA([.$T78]);&quot;null&quot;;&quot;&quot;&quot;&quot;&amp;[.$T78]&amp;&quot;&quot;&quot;&quot;);[$JSON.$F$1];[.$V78];[$JSON.$G$1];IF(ISNA([.$X78]);&quot;null&quot;;&quot;&quot;&quot;&quot;&amp;[.$X78]&amp;&quot;&quot;&quot;&quot;);[$JSON.$H$1];[.$AA78];[$JSON.$I$1];[.$I78];[$JSON.$J$1];[.K78];[$JSON.$K$1];[.$M78];[$JSON.$L$1];[.$P78];[$JSON.$M$1];[.$O78];[$JSON.$N$1];[.$S78];[$JSON.$O$1];[.$U78];[$JSON.$P$1];IF(ISNA([.$W78]);&quot;null&quot;;[.$W78]);[$JSON.$Q$1];[.$Y78];[$JSON.$R$1];IF([.$Z78];&quot;true&quot;;&quot;false&quot;);[$JSON.$S$1];[.$A78];[$JSON.$T$1];[.$B78];[$JSON.$U$1])" office:value-type="string" office:string-value="{&quot;id&quot;:&quot;1-38&quot;,&quot;name&quot;:&quot;鴨長明&quot;,&quot;displayName&quot;:&quot;鴨長明&quot;,&quot;kana&quot;:&quot;かものちょうめい&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rarity&quot;:1,&quot;type&quot;:1,&quot;level&quot;:4,&quot;color&quot;:4,&quot;term&quot;:2,&quot;trait&quot;:0,&quot;power&quot;:3000,&quot;legacy&quot;:0,&quot;anyNumCopies&quot;:false,&quot;orderTable&quot;:77,&quot;orderDeck&quot;:158}," calcext:value-type="string">
            <text:p>{"id":"1-38","name":"鴨長明","displayName":"鴨長明","kana":"かものちょうめい","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rarity":1,"type":1,"level":4,"color":4,"term":2,"trait":0,"power":3000,"legacy":0,"anyNumCopies":false,"orderTable":77,"orderDeck":158},</text:p>
          </table:table-cell>
          <table:table-cell table:number-columns-repeated="16356"/>
        </table:table-row>
        <table:table-row table:style-name="ro2">
          <table:table-cell table:style-name="ce11" office:value-type="float" office:value="78" calcext:value-type="float">
            <text:p>78</text:p>
          </table:table-cell>
          <table:table-cell table:style-name="ce11" office:value-type="float" office:value="159" calcext:value-type="float">
            <text:p>159</text:p>
          </table:table-cell>
          <table:table-cell table:style-name="ce21" office:value-type="string" calcext:value-type="string">
            <text:p>1-39</text:p>
          </table:table-cell>
          <table:table-cell table:style-name="ce21" office:value-type="float" office:value="39" calcext:value-type="float">
            <text:p>39</text:p>
          </table:table-cell>
          <table:table-cell table:style-name="ce11" office:value-type="string" calcext:value-type="string">
            <text:p>ヨハン・ゼバスティアン・バッハ</text:p>
          </table:table-cell>
          <table:table-cell table:style-name="ce11" table:formula="of:=[.E79]" office:value-type="string" office:string-value="ヨハン・ゼバスティアン・バッハ" calcext:value-type="string">
            <text:p>ヨハン・ゼバスティアン・バッハ</text:p>
          </table:table-cell>
          <table:table-cell table:style-name="ce11" office:value-type="string" calcext:value-type="string">
            <text:p>よはんぜばすてぃあんばっは</text:p>
          </table:table-cell>
          <table:table-cell table:style-name="ce11" office:value-type="string" calcext:value-type="string">
            <text:p>第１弾ブースターパック</text:p>
          </table:table-cell>
          <table:table-cell table:style-name="ce11" table:formula="of:=VLOOKUP([.H79];[$収録番号.$A$1:$収録番号.$B$10];2;0)" office:value-type="float" office:value="15" calcext:value-type="float">
            <text:p>15</text:p>
          </table:table-cell>
          <table:table-cell table:style-name="ce11" office:value-type="string" calcext:value-type="string">
            <text:p>N</text:p>
          </table:table-cell>
          <table:table-cell table:style-name="ce11" table:formula="of:=VLOOKUP([.J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79];[$種類番号.$A$1:$種類番号.$B$4];2;0)" office:value-type="float" office:value="1" calcext:value-type="float">
            <text:p>1</text:p>
          </table:table-cell>
          <table:table-cell table:style-name="ce11" office:value-type="string" calcext:value-type="string">
            <text:p>緑</text:p>
          </table:table-cell>
          <table:table-cell table:style-name="ce11" table:formula="of:=VLOOKUP([.N79];[$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79];[$能力語番号.$A$1:$能力語番号.$B$11];2;0);0)" office:value-type="float" office:value="0" calcext:value-type="float">
            <text:p>0</text:p>
          </table:table-cell>
          <table:table-cell office:value-type="string" calcext:value-type="string">
            <text:p>音楽</text:p>
          </table:table-cell>
          <table:table-cell table:style-name="ce11" table:formula="of:=IFERROR(VLOOKUP([.$T79];[$特性番号.$A$1:$特性番号.$B$8];2;0);0)" office:value-type="float" office:value="4" calcext:value-type="float">
            <text:p>4</text:p>
          </table:table-cell>
          <table:table-cell table:style-name="ce11" office:value-type="string" calcext:value-type="string">
            <text:p>これが戦場にいる間、戦場のイジンとハイケイは「特性：音楽」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7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39.png</text:p>
          </table:table-cell>
          <table:table-cell table:style-name="ce11" table:formula="of:=CONCATENATE([$JSON.$A$1];[.$C79];[$JSON.$B$1];[.$E79];[$JSON.$C$1];[.F79];[$JSON.$D$1];[.$G79];[$JSON.$E$1];IF(ISNA([.$T79]);&quot;null&quot;;&quot;&quot;&quot;&quot;&amp;[.$T79]&amp;&quot;&quot;&quot;&quot;);[$JSON.$F$1];[.$V79];[$JSON.$G$1];IF(ISNA([.$X79]);&quot;null&quot;;&quot;&quot;&quot;&quot;&amp;[.$X79]&amp;&quot;&quot;&quot;&quot;);[$JSON.$H$1];[.$AA79];[$JSON.$I$1];[.$I79];[$JSON.$J$1];[.K79];[$JSON.$K$1];[.$M79];[$JSON.$L$1];[.$P79];[$JSON.$M$1];[.$O79];[$JSON.$N$1];[.$S79];[$JSON.$O$1];[.$U79];[$JSON.$P$1];IF(ISNA([.$W79]);&quot;null&quot;;[.$W79]);[$JSON.$Q$1];[.$Y79];[$JSON.$R$1];IF([.$Z79];&quot;true&quot;;&quot;false&quot;);[$JSON.$S$1];[.$A79];[$JSON.$T$1];[.$B79];[$JSON.$U$1])" office:value-type="string" office:string-value="{&quot;id&quot;:&quot;1-39&quot;,&quot;name&quot;:&quot;ヨハン・ゼバスティアン・バッハ&quot;,&quot;displayName&quot;:&quot;ヨハン・ゼバスティアン・バッハ&quot;,&quot;kana&quot;:&quot;よはんぜばすてぃあんばっは&quot;,&quot;traitText&quot;:&quot;音楽&quot;,&quot;ruleText&quot;:&quot;これが戦場にいる間、戦場のイジンとハイケイは「特性：音楽」を得る。&quot;,&quot;legacyText&quot;:null,&quot;imageUrl&quot;:&quot;https://one-draw.jp/ijinden/cardlist/001/card/01_039.png&quot;,&quot;expansion&quot;:15,&quot;rarity&quot;:1,&quot;type&quot;:1,&quot;level&quot;:4,&quot;color&quot;:4,&quot;term&quot;:0,&quot;trait&quot;:4,&quot;power&quot;:4000,&quot;legacy&quot;:0,&quot;anyNumCopies&quot;:false,&quot;orderTable&quot;:78,&quot;orderDeck&quot;:159}," calcext:value-type="string">
            <text:p>{"id":"1-39","name":"ヨハン・ゼバスティアン・バッハ","displayName":"ヨハン・ゼバスティアン・バッハ","kana":"よはんぜばすてぃあんばっは","traitText":"音楽","ruleText":"これが戦場にいる間、戦場のイジンとハイケイは「特性：音楽」を得る。","legacyText":null,"imageUrl":"https://one-draw.jp/ijinden/cardlist/001/card/01_039.png","expansion":15,"rarity":1,"type":1,"level":4,"color":4,"term":0,"trait":4,"power":4000,"legacy":0,"anyNumCopies":false,"orderTable":78,"orderDeck":159},</text:p>
          </table:table-cell>
          <table:table-cell table:number-columns-repeated="16356"/>
        </table:table-row>
        <table:table-row table:style-name="ro2">
          <table:table-cell table:style-name="ce11" office:value-type="float" office:value="79" calcext:value-type="float">
            <text:p>79</text:p>
          </table:table-cell>
          <table:table-cell table:style-name="ce11" office:value-type="float" office:value="206" calcext:value-type="float">
            <text:p>206</text:p>
          </table:table-cell>
          <table:table-cell table:style-name="ce21" office:value-type="string" calcext:value-type="string">
            <text:p>1-40</text:p>
          </table:table-cell>
          <table:table-cell table:style-name="ce21" office:value-type="float" office:value="40" calcext:value-type="float">
            <text:p>40</text:p>
          </table:table-cell>
          <table:table-cell table:style-name="ce11" office:value-type="string" calcext:value-type="string">
            <text:p>大伴家持</text:p>
          </table:table-cell>
          <table:table-cell table:style-name="ce11" table:formula="of:=[.E80]" office:value-type="string" office:string-value="大伴家持" calcext:value-type="string">
            <text:p>大伴家持</text:p>
          </table:table-cell>
          <table:table-cell table:style-name="ce11" office:value-type="string" calcext:value-type="string">
            <text:p>おおとものやかもち</text:p>
          </table:table-cell>
          <table:table-cell table:style-name="ce11" office:value-type="string" calcext:value-type="string">
            <text:p>第１弾ブースターパック</text:p>
          </table:table-cell>
          <table:table-cell table:style-name="ce11" table:formula="of:=VLOOKUP([.H80];[$収録番号.$A$1:$収録番号.$B$10];2;0)" office:value-type="float" office:value="15" calcext:value-type="float">
            <text:p>15</text:p>
          </table:table-cell>
          <table:table-cell table:style-name="ce11" office:value-type="string" calcext:value-type="string">
            <text:p>R</text:p>
          </table:table-cell>
          <table:table-cell table:style-name="ce11" table:formula="of:=VLOOKUP([.J8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80];[$種類番号.$A$1:$種類番号.$B$4];2;0)" office:value-type="float" office:value="1" calcext:value-type="float">
            <text:p>1</text:p>
          </table:table-cell>
          <table:table-cell table:style-name="ce11" office:value-type="string" calcext:value-type="string">
            <text:p>緑</text:p>
          </table:table-cell>
          <table:table-cell table:style-name="ce11" table:formula="of:=VLOOKUP([.N80];[$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80];[$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80];[$特性番号.$A$1:$特性番号.$B$8];2;0);0)" office:value-type="float" office:value="0" calcext:value-type="float">
            <text:p>0</text:p>
          </table:table-cell>
          <table:table-cell table:style-name="ce11" office:value-type="string" calcext:value-type="string">
            <text:p>執筆 - ハイケイが戦場に置かれるたび、1ドローする。¶自分の戦場のハイケイ1つにつき「パワー+1000」を得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8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0.png</text:p>
          </table:table-cell>
          <table:table-cell table:style-name="ce11" table:formula="of:=CONCATENATE([$JSON.$A$1];[.$C80];[$JSON.$B$1];[.$E80];[$JSON.$C$1];[.F80];[$JSON.$D$1];[.$G80];[$JSON.$E$1];IF(ISNA([.$T80]);&quot;null&quot;;&quot;&quot;&quot;&quot;&amp;[.$T80]&amp;&quot;&quot;&quot;&quot;);[$JSON.$F$1];[.$V80];[$JSON.$G$1];IF(ISNA([.$X80]);&quot;null&quot;;&quot;&quot;&quot;&quot;&amp;[.$X80]&amp;&quot;&quot;&quot;&quot;);[$JSON.$H$1];[.$AA80];[$JSON.$I$1];[.$I80];[$JSON.$J$1];[.K80];[$JSON.$K$1];[.$M80];[$JSON.$L$1];[.$P80];[$JSON.$M$1];[.$O80];[$JSON.$N$1];[.$S80];[$JSON.$O$1];[.$U80];[$JSON.$P$1];IF(ISNA([.$W80]);&quot;null&quot;;[.$W80]);[$JSON.$Q$1];[.$Y80];[$JSON.$R$1];IF([.$Z80];&quot;true&quot;;&quot;false&quot;);[$JSON.$S$1];[.$A80];[$JSON.$T$1];[.$B80];[$JSON.$U$1])" office:value-type="string" office:string-value="{&quot;id&quot;:&quot;1-40&quot;,&quot;name&quot;:&quot;大伴家持&quot;,&quot;displayName&quot;:&quot;大伴家持&quot;,&quot;kana&quot;:&quot;おおとものやかもち&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rarity&quot;:2,&quot;type&quot;:1,&quot;level&quot;:5,&quot;color&quot;:4,&quot;term&quot;:2,&quot;trait&quot;:0,&quot;power&quot;:3000,&quot;legacy&quot;:0,&quot;anyNumCopies&quot;:false,&quot;orderTable&quot;:79,&quot;orderDeck&quot;:206}," calcext:value-type="string">
            <text:p>{"id":"1-40","name":"大伴家持","displayName":"大伴家持","kana":"おおとものやかもち","traitText":null,"ruleText":"執筆 - ハイケイが戦場に置かれるたび、1ドローする。¶自分の戦場のハイケイ1つにつき「パワー+1000」を得る。","legacyText":null,"imageUrl":"https://one-draw.jp/ijinden/cardlist/001/card/01_040.png","expansion":15,"rarity":2,"type":1,"level":5,"color":4,"term":2,"trait":0,"power":3000,"legacy":0,"anyNumCopies":false,"orderTable":79,"orderDeck":206},</text:p>
          </table:table-cell>
          <table:table-cell table:number-columns-repeated="16356"/>
        </table:table-row>
        <table:table-row table:style-name="ro2">
          <table:table-cell table:style-name="ce11" office:value-type="float" office:value="80" calcext:value-type="float">
            <text:p>80</text:p>
          </table:table-cell>
          <table:table-cell table:style-name="ce11" office:value-type="float" office:value="207" calcext:value-type="float">
            <text:p>207</text:p>
          </table:table-cell>
          <table:table-cell table:style-name="ce21" office:value-type="string" calcext:value-type="string">
            <text:p>1-41</text:p>
          </table:table-cell>
          <table:table-cell table:style-name="ce21" office:value-type="float" office:value="41" calcext:value-type="float">
            <text:p>41</text:p>
          </table:table-cell>
          <table:table-cell table:style-name="ce11" office:value-type="string" calcext:value-type="string">
            <text:p>フランツ・ペーター・シューベルト</text:p>
          </table:table-cell>
          <table:table-cell table:style-name="ce11" table:formula="of:=[.E81]" office:value-type="string" office:string-value="フランツ・ペーター・シューベルト" calcext:value-type="string">
            <text:p>フランツ・ペーター・シューベルト</text:p>
          </table:table-cell>
          <table:table-cell table:style-name="ce11" office:value-type="string" calcext:value-type="string">
            <text:p>ふらんつぺーたーしゅーべると</text:p>
          </table:table-cell>
          <table:table-cell table:style-name="ce11" office:value-type="string" calcext:value-type="string">
            <text:p>第１弾ブースターパック</text:p>
          </table:table-cell>
          <table:table-cell table:style-name="ce11" table:formula="of:=VLOOKUP([.H81];[$収録番号.$A$1:$収録番号.$B$10];2;0)" office:value-type="float" office:value="15" calcext:value-type="float">
            <text:p>15</text:p>
          </table:table-cell>
          <table:table-cell table:style-name="ce11" office:value-type="string" calcext:value-type="string">
            <text:p>N</text:p>
          </table:table-cell>
          <table:table-cell table:style-name="ce11" table:formula="of:=VLOOKUP([.J8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1];[$種類番号.$A$1:$種類番号.$B$4];2;0)" office:value-type="float" office:value="1" calcext:value-type="float">
            <text:p>1</text:p>
          </table:table-cell>
          <table:table-cell table:style-name="ce11" office:value-type="string" calcext:value-type="string">
            <text:p>緑</text:p>
          </table:table-cell>
          <table:table-cell table:style-name="ce11" table:formula="of:=VLOOKUP([.N81];[$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1];[$能力語番号.$A$1:$能力語番号.$B$11];2;0);0)" office:value-type="float" office:value="0" calcext:value-type="float">
            <text:p>0</text:p>
          </table:table-cell>
          <table:table-cell office:value-type="string" calcext:value-type="string">
            <text:p>音楽</text:p>
          </table:table-cell>
          <table:table-cell table:style-name="ce11" table:formula="of:=IFERROR(VLOOKUP([.$T81];[$特性番号.$A$1:$特性番号.$B$8];2;0);0)" office:value-type="float" office:value="4" calcext:value-type="float">
            <text:p>4</text:p>
          </table:table-cell>
          <table:table-cell table:style-name="ce11" office:value-type="string" calcext:value-type="string">
            <text:p>戦場に名前の異なる「音楽」カードが2つ以上ある間、相手は墓地のカードを戦場に置くことができ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1.png</text:p>
          </table:table-cell>
          <table:table-cell table:style-name="ce11" table:formula="of:=CONCATENATE([$JSON.$A$1];[.$C81];[$JSON.$B$1];[.$E81];[$JSON.$C$1];[.F81];[$JSON.$D$1];[.$G81];[$JSON.$E$1];IF(ISNA([.$T81]);&quot;null&quot;;&quot;&quot;&quot;&quot;&amp;[.$T81]&amp;&quot;&quot;&quot;&quot;);[$JSON.$F$1];[.$V81];[$JSON.$G$1];IF(ISNA([.$X81]);&quot;null&quot;;&quot;&quot;&quot;&quot;&amp;[.$X81]&amp;&quot;&quot;&quot;&quot;);[$JSON.$H$1];[.$AA81];[$JSON.$I$1];[.$I81];[$JSON.$J$1];[.K81];[$JSON.$K$1];[.$M81];[$JSON.$L$1];[.$P81];[$JSON.$M$1];[.$O81];[$JSON.$N$1];[.$S81];[$JSON.$O$1];[.$U81];[$JSON.$P$1];IF(ISNA([.$W81]);&quot;null&quot;;[.$W81]);[$JSON.$Q$1];[.$Y81];[$JSON.$R$1];IF([.$Z81];&quot;true&quot;;&quot;false&quot;);[$JSON.$S$1];[.$A81];[$JSON.$T$1];[.$B81];[$JSON.$U$1])" office:value-type="string" office:string-value="{&quot;id&quot;:&quot;1-41&quot;,&quot;name&quot;:&quot;フランツ・ペーター・シューベルト&quot;,&quot;displayName&quot;:&quot;フランツ・ペーター・シューベルト&quot;,&quot;kana&quot;:&quot;ふらんつぺーたーしゅーべると&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rarity&quot;:1,&quot;type&quot;:1,&quot;level&quot;:5,&quot;color&quot;:4,&quot;term&quot;:0,&quot;trait&quot;:4,&quot;power&quot;:4000,&quot;legacy&quot;:0,&quot;anyNumCopies&quot;:false,&quot;orderTable&quot;:80,&quot;orderDeck&quot;:207}," calcext:value-type="string">
            <text:p>{"id":"1-41","name":"フランツ・ペーター・シューベルト","displayName":"フランツ・ペーター・シューベルト","kana":"ふらんつぺーたーしゅーべると","traitText":"音楽","ruleText":"戦場に名前の異なる「音楽」カードが2つ以上ある間、相手は墓地のカードを戦場に置くことができない。","legacyText":null,"imageUrl":"https://one-draw.jp/ijinden/cardlist/001/card/01_041.png","expansion":15,"rarity":1,"type":1,"level":5,"color":4,"term":0,"trait":4,"power":4000,"legacy":0,"anyNumCopies":false,"orderTable":80,"orderDeck":207},</text:p>
          </table:table-cell>
          <table:table-cell table:number-columns-repeated="16356"/>
        </table:table-row>
        <table:table-row table:style-name="ro2">
          <table:table-cell table:style-name="ce11" office:value-type="float" office:value="81" calcext:value-type="float">
            <text:p>81</text:p>
          </table:table-cell>
          <table:table-cell table:style-name="ce11" office:value-type="float" office:value="241" calcext:value-type="float">
            <text:p>241</text:p>
          </table:table-cell>
          <table:table-cell table:style-name="ce21" office:value-type="string" calcext:value-type="string">
            <text:p>1-42</text:p>
          </table:table-cell>
          <table:table-cell table:style-name="ce21" office:value-type="float" office:value="42" calcext:value-type="float">
            <text:p>42</text:p>
          </table:table-cell>
          <table:table-cell table:style-name="ce11" office:value-type="string" calcext:value-type="string">
            <text:p>空海</text:p>
          </table:table-cell>
          <table:table-cell table:style-name="ce11" table:formula="of:=[.E82]" office:value-type="string" office:string-value="空海" calcext:value-type="string">
            <text:p>空海</text:p>
          </table:table-cell>
          <table:table-cell table:style-name="ce11" office:value-type="string" calcext:value-type="string">
            <text:p>くうかい</text:p>
          </table:table-cell>
          <table:table-cell table:style-name="ce11" office:value-type="string" calcext:value-type="string">
            <text:p>第１弾ブースターパック</text:p>
          </table:table-cell>
          <table:table-cell table:style-name="ce11" table:formula="of:=VLOOKUP([.H82];[$収録番号.$A$1:$収録番号.$B$10];2;0)" office:value-type="float" office:value="15" calcext:value-type="float">
            <text:p>15</text:p>
          </table:table-cell>
          <table:table-cell table:style-name="ce11" office:value-type="string" calcext:value-type="string">
            <text:p>N</text:p>
          </table:table-cell>
          <table:table-cell table:style-name="ce11" table:formula="of:=VLOOKUP([.J8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2];[$種類番号.$A$1:$種類番号.$B$4];2;0)" office:value-type="float" office:value="1" calcext:value-type="float">
            <text:p>1</text:p>
          </table:table-cell>
          <table:table-cell table:style-name="ce11" office:value-type="string" calcext:value-type="string">
            <text:p>緑</text:p>
          </table:table-cell>
          <table:table-cell table:style-name="ce11" table:formula="of:=VLOOKUP([.N82];[$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82];[$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82];[$特性番号.$A$1:$特性番号.$B$8];2;0);0)" office:value-type="float" office:value="0" calcext:value-type="float">
            <text:p>0</text:p>
          </table:table-cell>
          <table:table-cell table:style-name="ce11"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table:style-name="ce11" office:value-type="float" office:value="5000" calcext:value-type="float">
            <text:p>5000</text:p>
          </table:table-cell>
          <table:table-cell table:style-name="ce25" office:value-type="string" calcext:value-type="string">
            <text:p>魔力化</text:p>
          </table:table-cell>
          <table:table-cell table:style-name="ce11" table:formula="of:=IFERROR(VLOOKUP([.$X8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2.png</text:p>
          </table:table-cell>
          <table:table-cell table:style-name="ce11" table:formula="of:=CONCATENATE([$JSON.$A$1];[.$C82];[$JSON.$B$1];[.$E82];[$JSON.$C$1];[.F82];[$JSON.$D$1];[.$G82];[$JSON.$E$1];IF(ISNA([.$T82]);&quot;null&quot;;&quot;&quot;&quot;&quot;&amp;[.$T82]&amp;&quot;&quot;&quot;&quot;);[$JSON.$F$1];[.$V82];[$JSON.$G$1];IF(ISNA([.$X82]);&quot;null&quot;;&quot;&quot;&quot;&quot;&amp;[.$X82]&amp;&quot;&quot;&quot;&quot;);[$JSON.$H$1];[.$AA82];[$JSON.$I$1];[.$I82];[$JSON.$J$1];[.K82];[$JSON.$K$1];[.$M82];[$JSON.$L$1];[.$P82];[$JSON.$M$1];[.$O82];[$JSON.$N$1];[.$S82];[$JSON.$O$1];[.$U82];[$JSON.$P$1];IF(ISNA([.$W82]);&quot;null&quot;;[.$W82]);[$JSON.$Q$1];[.$Y82];[$JSON.$R$1];IF([.$Z82];&quot;true&quot;;&quot;false&quot;);[$JSON.$S$1];[.$A82];[$JSON.$T$1];[.$B82];[$JSON.$U$1])" office:value-type="string" office:string-value="{&quot;id&quot;:&quot;1-42&quot;,&quot;name&quot;:&quot;空海&quot;,&quot;displayName&quot;:&quot;空海&quot;,&quot;kana&quot;:&quot;くうかい&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rarity&quot;:1,&quot;type&quot;:1,&quot;level&quot;:6,&quot;color&quot;:4,&quot;term&quot;:1,&quot;trait&quot;:0,&quot;power&quot;:5000,&quot;legacy&quot;:1,&quot;anyNumCopies&quot;:false,&quot;orderTable&quot;:81,&quot;orderDeck&quot;:241}," calcext:value-type="string">
            <text:p>{"id":"1-42","name":"空海","displayName":"空海","kana":"くうかい","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rarity":1,"type":1,"level":6,"color":4,"term":1,"trait":0,"power":5000,"legacy":1,"anyNumCopies":false,"orderTable":81,"orderDeck":241},</text:p>
          </table:table-cell>
          <table:table-cell table:number-columns-repeated="16356"/>
        </table:table-row>
        <table:table-row table:style-name="ro2">
          <table:table-cell table:style-name="ce11" office:value-type="float" office:value="82" calcext:value-type="float">
            <text:p>82</text:p>
          </table:table-cell>
          <table:table-cell table:style-name="ce11" office:value-type="float" office:value="242" calcext:value-type="float">
            <text:p>242</text:p>
          </table:table-cell>
          <table:table-cell table:style-name="ce21" office:value-type="string" calcext:value-type="string">
            <text:p>1-43</text:p>
          </table:table-cell>
          <table:table-cell table:style-name="ce21" office:value-type="float" office:value="43" calcext:value-type="float">
            <text:p>43</text:p>
          </table:table-cell>
          <table:table-cell table:style-name="ce11" office:value-type="string" calcext:value-type="string">
            <text:p>清少納言</text:p>
          </table:table-cell>
          <table:table-cell table:style-name="ce11" table:formula="of:=[.E83]" office:value-type="string" office:string-value="清少納言" calcext:value-type="string">
            <text:p>清少納言</text:p>
          </table:table-cell>
          <table:table-cell table:style-name="ce11" office:value-type="string" calcext:value-type="string">
            <text:p>せいしょうなごん</text:p>
          </table:table-cell>
          <table:table-cell table:style-name="ce11" office:value-type="string" calcext:value-type="string">
            <text:p>第１弾ブースターパック</text:p>
          </table:table-cell>
          <table:table-cell table:style-name="ce11" table:formula="of:=VLOOKUP([.H83];[$収録番号.$A$1:$収録番号.$B$10];2;0)" office:value-type="float" office:value="15" calcext:value-type="float">
            <text:p>15</text:p>
          </table:table-cell>
          <table:table-cell table:style-name="ce11" office:value-type="string" calcext:value-type="string">
            <text:p>N</text:p>
          </table:table-cell>
          <table:table-cell table:style-name="ce11" table:formula="of:=VLOOKUP([.J8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3];[$種類番号.$A$1:$種類番号.$B$4];2;0)" office:value-type="float" office:value="1" calcext:value-type="float">
            <text:p>1</text:p>
          </table:table-cell>
          <table:table-cell table:style-name="ce11" office:value-type="string" calcext:value-type="string">
            <text:p>緑</text:p>
          </table:table-cell>
          <table:table-cell table:style-name="ce11" table:formula="of:=VLOOKUP([.N83];[$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83];[$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83];[$特性番号.$A$1:$特性番号.$B$8];2;0);0)" office:value-type="float" office:value="0" calcext:value-type="float">
            <text:p>0</text:p>
          </table:table-cell>
          <table:table-cell table:style-name="ce11"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8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3.png</text:p>
          </table:table-cell>
          <table:table-cell table:style-name="ce11" table:formula="of:=CONCATENATE([$JSON.$A$1];[.$C83];[$JSON.$B$1];[.$E83];[$JSON.$C$1];[.F83];[$JSON.$D$1];[.$G83];[$JSON.$E$1];IF(ISNA([.$T83]);&quot;null&quot;;&quot;&quot;&quot;&quot;&amp;[.$T83]&amp;&quot;&quot;&quot;&quot;);[$JSON.$F$1];[.$V83];[$JSON.$G$1];IF(ISNA([.$X83]);&quot;null&quot;;&quot;&quot;&quot;&quot;&amp;[.$X83]&amp;&quot;&quot;&quot;&quot;);[$JSON.$H$1];[.$AA83];[$JSON.$I$1];[.$I83];[$JSON.$J$1];[.K83];[$JSON.$K$1];[.$M83];[$JSON.$L$1];[.$P83];[$JSON.$M$1];[.$O83];[$JSON.$N$1];[.$S83];[$JSON.$O$1];[.$U83];[$JSON.$P$1];IF(ISNA([.$W83]);&quot;null&quot;;[.$W83]);[$JSON.$Q$1];[.$Y83];[$JSON.$R$1];IF([.$Z83];&quot;true&quot;;&quot;false&quot;);[$JSON.$S$1];[.$A83];[$JSON.$T$1];[.$B83];[$JSON.$U$1])" office:value-type="string" office:string-value="{&quot;id&quot;:&quot;1-43&quot;,&quot;name&quot;:&quot;清少納言&quot;,&quot;displayName&quot;:&quot;清少納言&quot;,&quot;kana&quot;:&quot;せいしょうなごん&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rarity&quot;:1,&quot;type&quot;:1,&quot;level&quot;:6,&quot;color&quot;:4,&quot;term&quot;:2,&quot;trait&quot;:0,&quot;power&quot;:3000,&quot;legacy&quot;:0,&quot;anyNumCopies&quot;:false,&quot;orderTable&quot;:82,&quot;orderDeck&quot;:242}," calcext:value-type="string">
            <text:p>{"id":"1-43","name":"清少納言","displayName":"清少納言","kana":"せいしょうなごん","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rarity":1,"type":1,"level":6,"color":4,"term":2,"trait":0,"power":3000,"legacy":0,"anyNumCopies":false,"orderTable":82,"orderDeck":242},</text:p>
          </table:table-cell>
          <table:table-cell table:number-columns-repeated="16356"/>
        </table:table-row>
        <table:table-row table:style-name="ro2">
          <table:table-cell table:style-name="ce11" office:value-type="float" office:value="83" calcext:value-type="float">
            <text:p>83</text:p>
          </table:table-cell>
          <table:table-cell table:style-name="ce11" office:value-type="float" office:value="243" calcext:value-type="float">
            <text:p>243</text:p>
          </table:table-cell>
          <table:table-cell table:style-name="ce21" office:value-type="string" calcext:value-type="string">
            <text:p>1-44</text:p>
          </table:table-cell>
          <table:table-cell table:style-name="ce21" office:value-type="float" office:value="44" calcext:value-type="float">
            <text:p>44</text:p>
          </table:table-cell>
          <table:table-cell table:style-name="ce11" office:value-type="string" calcext:value-type="string">
            <text:p>ルートヴィヒ・ヴァン・ベートーヴェン</text:p>
          </table:table-cell>
          <table:table-cell table:style-name="ce11" table:formula="of:=[.E84]" office:value-type="string" office:string-value="ルートヴィヒ・ヴァン・ベートーヴェン" calcext:value-type="string">
            <text:p>ルートヴィヒ・ヴァン・ベートーヴェン</text:p>
          </table:table-cell>
          <table:table-cell table:style-name="ce11" office:value-type="string" calcext:value-type="string">
            <text:p>るーとゔぃひゔぁんべーとーゔぇん</text:p>
          </table:table-cell>
          <table:table-cell table:style-name="ce11" office:value-type="string" calcext:value-type="string">
            <text:p>第１弾ブースターパック</text:p>
          </table:table-cell>
          <table:table-cell table:style-name="ce11" table:formula="of:=VLOOKUP([.H84];[$収録番号.$A$1:$収録番号.$B$10];2;0)" office:value-type="float" office:value="15" calcext:value-type="float">
            <text:p>15</text:p>
          </table:table-cell>
          <table:table-cell table:style-name="ce11" office:value-type="string" calcext:value-type="string">
            <text:p>N</text:p>
          </table:table-cell>
          <table:table-cell table:style-name="ce11" table:formula="of:=VLOOKUP([.J8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84];[$種類番号.$A$1:$種類番号.$B$4];2;0)" office:value-type="float" office:value="1" calcext:value-type="float">
            <text:p>1</text:p>
          </table:table-cell>
          <table:table-cell table:style-name="ce11" office:value-type="string" calcext:value-type="string">
            <text:p>緑</text:p>
          </table:table-cell>
          <table:table-cell table:style-name="ce11" table:formula="of:=VLOOKUP([.N84];[$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4];[$能力語番号.$A$1:$能力語番号.$B$11];2;0);0)" office:value-type="float" office:value="0" calcext:value-type="float">
            <text:p>0</text:p>
          </table:table-cell>
          <table:table-cell office:value-type="string" calcext:value-type="string">
            <text:p>音楽</text:p>
          </table:table-cell>
          <table:table-cell table:style-name="ce11" table:formula="of:=IFERROR(VLOOKUP([.$T84];[$特性番号.$A$1:$特性番号.$B$8];2;0);0)" office:value-type="float" office:value="4" calcext:value-type="float">
            <text:p>4</text:p>
          </table:table-cell>
          <table:table-cell table:style-name="ce11" office:value-type="string" calcext:value-type="string">
            <text:p>戦場に名前の異なる「音楽」カードが3つ以上ある間、相手は墓地のカードを手札に戻すことができない。</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8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4.png</text:p>
          </table:table-cell>
          <table:table-cell table:style-name="ce11" table:formula="of:=CONCATENATE([$JSON.$A$1];[.$C84];[$JSON.$B$1];[.$E84];[$JSON.$C$1];[.F84];[$JSON.$D$1];[.$G84];[$JSON.$E$1];IF(ISNA([.$T84]);&quot;null&quot;;&quot;&quot;&quot;&quot;&amp;[.$T84]&amp;&quot;&quot;&quot;&quot;);[$JSON.$F$1];[.$V84];[$JSON.$G$1];IF(ISNA([.$X84]);&quot;null&quot;;&quot;&quot;&quot;&quot;&amp;[.$X84]&amp;&quot;&quot;&quot;&quot;);[$JSON.$H$1];[.$AA84];[$JSON.$I$1];[.$I84];[$JSON.$J$1];[.K84];[$JSON.$K$1];[.$M84];[$JSON.$L$1];[.$P84];[$JSON.$M$1];[.$O84];[$JSON.$N$1];[.$S84];[$JSON.$O$1];[.$U84];[$JSON.$P$1];IF(ISNA([.$W84]);&quot;null&quot;;[.$W84]);[$JSON.$Q$1];[.$Y84];[$JSON.$R$1];IF([.$Z84];&quot;true&quot;;&quot;false&quot;);[$JSON.$S$1];[.$A84];[$JSON.$T$1];[.$B84];[$JSON.$U$1])" office:value-type="string" office:string-value="{&quot;id&quot;:&quot;1-44&quot;,&quot;name&quot;:&quot;ルートヴィヒ・ヴァン・ベートーヴェン&quot;,&quot;displayName&quot;:&quot;ルートヴィヒ・ヴァン・ベートーヴェン&quot;,&quot;kana&quot;:&quot;るーとゔぃひゔぁんべーとーゔぇん&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rarity&quot;:1,&quot;type&quot;:1,&quot;level&quot;:6,&quot;color&quot;:4,&quot;term&quot;:0,&quot;trait&quot;:4,&quot;power&quot;:4000,&quot;legacy&quot;:0,&quot;anyNumCopies&quot;:false,&quot;orderTable&quot;:83,&quot;orderDeck&quot;:243}," calcext:value-type="string">
            <text:p>{"id":"1-44","name":"ルートヴィヒ・ヴァン・ベートーヴェン","displayName":"ルートヴィヒ・ヴァン・ベートーヴェン","kana":"るーとゔぃひゔぁんべーとーゔぇん","traitText":"音楽","ruleText":"戦場に名前の異なる「音楽」カードが3つ以上ある間、相手は墓地のカードを手札に戻すことができない。","legacyText":null,"imageUrl":"https://one-draw.jp/ijinden/cardlist/001/card/01_044.png","expansion":15,"rarity":1,"type":1,"level":6,"color":4,"term":0,"trait":4,"power":4000,"legacy":0,"anyNumCopies":false,"orderTable":83,"orderDeck":243},</text:p>
          </table:table-cell>
          <table:table-cell table:number-columns-repeated="16356"/>
        </table:table-row>
        <table:table-row table:style-name="ro2">
          <table:table-cell table:style-name="ce11" office:value-type="float" office:value="84" calcext:value-type="float">
            <text:p>84</text:p>
          </table:table-cell>
          <table:table-cell table:style-name="ce11" office:value-type="float" office:value="266" calcext:value-type="float">
            <text:p>266</text:p>
          </table:table-cell>
          <table:table-cell table:style-name="ce21" office:value-type="string" calcext:value-type="string">
            <text:p>1-45</text:p>
          </table:table-cell>
          <table:table-cell table:style-name="ce21" office:value-type="float" office:value="45" calcext:value-type="float">
            <text:p>45</text:p>
          </table:table-cell>
          <table:table-cell table:style-name="ce11" office:value-type="string" calcext:value-type="string">
            <text:p>行基</text:p>
          </table:table-cell>
          <table:table-cell table:style-name="ce11" table:formula="of:=[.E85]" office:value-type="string" office:string-value="行基" calcext:value-type="string">
            <text:p>行基</text:p>
          </table:table-cell>
          <table:table-cell table:style-name="ce11" office:value-type="string" calcext:value-type="string">
            <text:p>ぎょうき</text:p>
          </table:table-cell>
          <table:table-cell table:style-name="ce11" office:value-type="string" calcext:value-type="string">
            <text:p>第１弾ブースターパック</text:p>
          </table:table-cell>
          <table:table-cell table:style-name="ce11" table:formula="of:=VLOOKUP([.H85];[$収録番号.$A$1:$収録番号.$B$10];2;0)" office:value-type="float" office:value="15" calcext:value-type="float">
            <text:p>15</text:p>
          </table:table-cell>
          <table:table-cell table:style-name="ce11" office:value-type="string" calcext:value-type="string">
            <text:p>R</text:p>
          </table:table-cell>
          <table:table-cell table:style-name="ce11" table:formula="of:=VLOOKUP([.J8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85];[$種類番号.$A$1:$種類番号.$B$4];2;0)" office:value-type="float" office:value="1" calcext:value-type="float">
            <text:p>1</text:p>
          </table:table-cell>
          <table:table-cell table:style-name="ce11" office:value-type="string" calcext:value-type="string">
            <text:p>緑</text:p>
          </table:table-cell>
          <table:table-cell table:style-name="ce11" table:formula="of:=VLOOKUP([.N85];[$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85];[$特性番号.$A$1:$特性番号.$B$8];2;0);0)" office:value-type="float" office:value="0" calcext:value-type="float">
            <text:p>0</text:p>
          </table:table-cell>
          <table:table-cell table:style-name="ce11" office:value-type="string" calcext:value-type="string">
            <text:p>戦場に置かれたとき、イジン召喚権+1して、自分の戦場のハイケイ1つにつき1ドローする。¶これが戦場にいる間、自分の戦場のハイケイは破壊されない。</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8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5.png</text:p>
          </table:table-cell>
          <table:table-cell table:style-name="ce11" table:formula="of:=CONCATENATE([$JSON.$A$1];[.$C85];[$JSON.$B$1];[.$E85];[$JSON.$C$1];[.F85];[$JSON.$D$1];[.$G85];[$JSON.$E$1];IF(ISNA([.$T85]);&quot;null&quot;;&quot;&quot;&quot;&quot;&amp;[.$T85]&amp;&quot;&quot;&quot;&quot;);[$JSON.$F$1];[.$V85];[$JSON.$G$1];IF(ISNA([.$X85]);&quot;null&quot;;&quot;&quot;&quot;&quot;&amp;[.$X85]&amp;&quot;&quot;&quot;&quot;);[$JSON.$H$1];[.$AA85];[$JSON.$I$1];[.$I85];[$JSON.$J$1];[.K85];[$JSON.$K$1];[.$M85];[$JSON.$L$1];[.$P85];[$JSON.$M$1];[.$O85];[$JSON.$N$1];[.$S85];[$JSON.$O$1];[.$U85];[$JSON.$P$1];IF(ISNA([.$W85]);&quot;null&quot;;[.$W85]);[$JSON.$Q$1];[.$Y85];[$JSON.$R$1];IF([.$Z85];&quot;true&quot;;&quot;false&quot;);[$JSON.$S$1];[.$A85];[$JSON.$T$1];[.$B85];[$JSON.$U$1])" office:value-type="string" office:string-value="{&quot;id&quot;:&quot;1-45&quot;,&quot;name&quot;:&quot;行基&quot;,&quot;displayName&quot;:&quot;行基&quot;,&quot;kana&quot;:&quot;ぎょうき&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rarity&quot;:2,&quot;type&quot;:1,&quot;level&quot;:7,&quot;color&quot;:4,&quot;term&quot;:0,&quot;trait&quot;:0,&quot;power&quot;:3000,&quot;legacy&quot;:4,&quot;anyNumCopies&quot;:false,&quot;orderTable&quot;:84,&quot;orderDeck&quot;:266}," calcext:value-type="string">
            <text:p>{"id":"1-45","name":"行基","displayName":"行基","kana":"ぎょうき","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rarity":2,"type":1,"level":7,"color":4,"term":0,"trait":0,"power":3000,"legacy":4,"anyNumCopies":false,"orderTable":84,"orderDeck":266},</text:p>
          </table:table-cell>
          <table:table-cell table:number-columns-repeated="16356"/>
        </table:table-row>
        <table:table-row table:style-name="ro2">
          <table:table-cell table:style-name="ce11" office:value-type="float" office:value="85" calcext:value-type="float">
            <text:p>85</text:p>
          </table:table-cell>
          <table:table-cell table:style-name="ce11" office:value-type="float" office:value="331" calcext:value-type="float">
            <text:p>331</text:p>
          </table:table-cell>
          <table:table-cell table:style-name="ce21" office:value-type="string" calcext:value-type="string">
            <text:p>1-46</text:p>
          </table:table-cell>
          <table:table-cell table:style-name="ce21" office:value-type="float" office:value="46" calcext:value-type="float">
            <text:p>46</text:p>
          </table:table-cell>
          <table:table-cell table:style-name="ce11" office:value-type="string" calcext:value-type="string">
            <text:p>武者の蔵</text:p>
          </table:table-cell>
          <table:table-cell table:style-name="ce11" table:formula="of:=[.E86]" office:value-type="string" office:string-value="武者の蔵" calcext:value-type="string">
            <text:p>武者の蔵</text:p>
          </table:table-cell>
          <table:table-cell table:style-name="ce11" office:value-type="string" calcext:value-type="string">
            <text:p>むしゃのくら</text:p>
          </table:table-cell>
          <table:table-cell table:style-name="ce11" office:value-type="string" calcext:value-type="string">
            <text:p>第１弾ブースターパック</text:p>
          </table:table-cell>
          <table:table-cell table:style-name="ce11" table:formula="of:=VLOOKUP([.H86];[$収録番号.$A$1:$収録番号.$B$10];2;0)" office:value-type="float" office:value="15" calcext:value-type="float">
            <text:p>15</text:p>
          </table:table-cell>
          <table:table-cell table:style-name="ce11" office:value-type="string" calcext:value-type="string">
            <text:p>N</text:p>
          </table:table-cell>
          <table:table-cell table:style-name="ce11" table:formula="of:=VLOOKUP([.J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6];[$種類番号.$A$1:$種類番号.$B$4];2;0)" office:value-type="float" office:value="2" calcext:value-type="float">
            <text:p>2</text:p>
          </table:table-cell>
          <table:table-cell table:style-name="ce11" office:value-type="string" calcext:value-type="string">
            <text:p>赤</text:p>
          </table:table-cell>
          <table:table-cell table:style-name="ce11" table:formula="of:=VLOOKUP([.N86];[$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86];[$特性番号.$A$1:$特性番号.$B$8];2;0);0)" office:value-type="float" office:value="0" calcext:value-type="float">
            <text:p>0</text:p>
          </table:table-cell>
          <table:table-cell table:style-name="ce11" office:value-type="string" calcext:value-type="string">
            <text:p>これが戦場にある間、自分の戦場のレベル2以下のイジンは「特性：剣術」を得る。¶これが戦場にある間、自分の戦場の「剣術」イジンは「即応」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8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6.png</text:p>
          </table:table-cell>
          <table:table-cell table:style-name="ce11" table:formula="of:=CONCATENATE([$JSON.$A$1];[.$C86];[$JSON.$B$1];[.$E86];[$JSON.$C$1];[.F86];[$JSON.$D$1];[.$G86];[$JSON.$E$1];IF(ISNA([.$T86]);&quot;null&quot;;&quot;&quot;&quot;&quot;&amp;[.$T86]&amp;&quot;&quot;&quot;&quot;);[$JSON.$F$1];[.$V86];[$JSON.$G$1];IF(ISNA([.$X86]);&quot;null&quot;;&quot;&quot;&quot;&quot;&amp;[.$X86]&amp;&quot;&quot;&quot;&quot;);[$JSON.$H$1];[.$AA86];[$JSON.$I$1];[.$I86];[$JSON.$J$1];[.K86];[$JSON.$K$1];[.$M86];[$JSON.$L$1];[.$P86];[$JSON.$M$1];[.$O86];[$JSON.$N$1];[.$S86];[$JSON.$O$1];[.$U86];[$JSON.$P$1];IF(ISNA([.$W86]);&quot;null&quot;;[.$W86]);[$JSON.$Q$1];[.$Y86];[$JSON.$R$1];IF([.$Z86];&quot;true&quot;;&quot;false&quot;);[$JSON.$S$1];[.$A86];[$JSON.$T$1];[.$B86];[$JSON.$U$1])" office:value-type="string" office:string-value="{&quot;id&quot;:&quot;1-46&quot;,&quot;name&quot;:&quot;武者の蔵&quot;,&quot;displayName&quot;:&quot;武者の蔵&quot;,&quot;kana&quot;:&quot;むしゃのくら&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rarity&quot;:1,&quot;type&quot;:2,&quot;level&quot;:4,&quot;color&quot;:1,&quot;term&quot;:0,&quot;trait&quot;:0,&quot;power&quot;:null,&quot;legacy&quot;:1,&quot;anyNumCopies&quot;:false,&quot;orderTable&quot;:85,&quot;orderDeck&quot;:331}," calcext:value-type="string">
            <text:p>{"id":"1-46","name":"武者の蔵","displayName":"武者の蔵","kana":"むしゃのくら","traitText":null,"ruleText":"これが戦場にある間、自分の戦場のレベル2以下のイジンは「特性：剣術」を得る。¶これが戦場にある間、自分の戦場の「剣術」イジンは「即応」を得る。","legacyText":"魔力化","imageUrl":"https://one-draw.jp/ijinden/cardlist/001/card/01_046.png","expansion":15,"rarity":1,"type":2,"level":4,"color":1,"term":0,"trait":0,"power":null,"legacy":1,"anyNumCopies":false,"orderTable":85,"orderDeck":331},</text:p>
          </table:table-cell>
          <table:table-cell table:number-columns-repeated="16356"/>
        </table:table-row>
        <table:table-row table:style-name="ro2">
          <table:table-cell table:style-name="ce11" office:value-type="float" office:value="86" calcext:value-type="float">
            <text:p>86</text:p>
          </table:table-cell>
          <table:table-cell table:style-name="ce11" office:value-type="float" office:value="333" calcext:value-type="float">
            <text:p>333</text:p>
          </table:table-cell>
          <table:table-cell table:style-name="ce21" office:value-type="string" calcext:value-type="string">
            <text:p>1-47</text:p>
          </table:table-cell>
          <table:table-cell table:style-name="ce21" office:value-type="float" office:value="47" calcext:value-type="float">
            <text:p>47</text:p>
          </table:table-cell>
          <table:table-cell table:style-name="ce11" office:value-type="string" calcext:value-type="string">
            <text:p>純白の塔</text:p>
          </table:table-cell>
          <table:table-cell table:style-name="ce11" table:formula="of:=[.E87]" office:value-type="string" office:string-value="純白の塔" calcext:value-type="string">
            <text:p>純白の塔</text:p>
          </table:table-cell>
          <table:table-cell table:style-name="ce11" office:value-type="string" calcext:value-type="string">
            <text:p>じゅんぱくのとう</text:p>
          </table:table-cell>
          <table:table-cell table:style-name="ce11" office:value-type="string" calcext:value-type="string">
            <text:p>第１弾ブースターパック</text:p>
          </table:table-cell>
          <table:table-cell table:style-name="ce11" table:formula="of:=VLOOKUP([.H87];[$収録番号.$A$1:$収録番号.$B$10];2;0)" office:value-type="float" office:value="15" calcext:value-type="float">
            <text:p>15</text:p>
          </table:table-cell>
          <table:table-cell table:style-name="ce11" office:value-type="string" calcext:value-type="string">
            <text:p>N</text:p>
          </table:table-cell>
          <table:table-cell table:style-name="ce11" table:formula="of:=VLOOKUP([.J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7];[$種類番号.$A$1:$種類番号.$B$4];2;0)" office:value-type="float" office:value="2" calcext:value-type="float">
            <text:p>2</text:p>
          </table:table-cell>
          <table:table-cell table:style-name="ce11" office:value-type="string" calcext:value-type="string">
            <text:p>青</text:p>
          </table:table-cell>
          <table:table-cell table:style-name="ce11" table:formula="of:=VLOOKUP([.N87];[$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87];[$特性番号.$A$1:$特性番号.$B$8];2;0);0)" office:value-type="float" office:value="0" calcext:value-type="float">
            <text:p>0</text:p>
          </table:table-cell>
          <table:table-cell table:style-name="ce11" office:value-type="string" calcext:value-type="string">
            <text:p>自分が3体以上でアタックしたとき、アタッカー1体を指定して発動できる。そのアタッカーは、このターンの間「イジンにブロックされない」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87];[$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7.png</text:p>
          </table:table-cell>
          <table:table-cell table:style-name="ce11" table:formula="of:=CONCATENATE([$JSON.$A$1];[.$C87];[$JSON.$B$1];[.$E87];[$JSON.$C$1];[.F87];[$JSON.$D$1];[.$G87];[$JSON.$E$1];IF(ISNA([.$T87]);&quot;null&quot;;&quot;&quot;&quot;&quot;&amp;[.$T87]&amp;&quot;&quot;&quot;&quot;);[$JSON.$F$1];[.$V87];[$JSON.$G$1];IF(ISNA([.$X87]);&quot;null&quot;;&quot;&quot;&quot;&quot;&amp;[.$X87]&amp;&quot;&quot;&quot;&quot;);[$JSON.$H$1];[.$AA87];[$JSON.$I$1];[.$I87];[$JSON.$J$1];[.K87];[$JSON.$K$1];[.$M87];[$JSON.$L$1];[.$P87];[$JSON.$M$1];[.$O87];[$JSON.$N$1];[.$S87];[$JSON.$O$1];[.$U87];[$JSON.$P$1];IF(ISNA([.$W87]);&quot;null&quot;;[.$W87]);[$JSON.$Q$1];[.$Y87];[$JSON.$R$1];IF([.$Z87];&quot;true&quot;;&quot;false&quot;);[$JSON.$S$1];[.$A87];[$JSON.$T$1];[.$B87];[$JSON.$U$1])" office:value-type="string" office:string-value="{&quot;id&quot;:&quot;1-47&quot;,&quot;name&quot;:&quot;純白の塔&quot;,&quot;displayName&quot;:&quot;純白の塔&quot;,&quot;kana&quot;:&quot;じゅんぱくのとう&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rarity&quot;:1,&quot;type&quot;:2,&quot;level&quot;:4,&quot;color&quot;:2,&quot;term&quot;:0,&quot;trait&quot;:0,&quot;power&quot;:null,&quot;legacy&quot;:5,&quot;anyNumCopies&quot;:false,&quot;orderTable&quot;:86,&quot;orderDeck&quot;:333}," calcext:value-type="string">
            <text:p>{"id":"1-47","name":"純白の塔","displayName":"純白の塔","kana":"じゅんぱくのとう","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rarity":1,"type":2,"level":4,"color":2,"term":0,"trait":0,"power":null,"legacy":5,"anyNumCopies":false,"orderTable":86,"orderDeck":333},</text:p>
          </table:table-cell>
          <table:table-cell table:number-columns-repeated="16356"/>
        </table:table-row>
        <table:table-row table:style-name="ro2">
          <table:table-cell table:style-name="ce11" office:value-type="float" office:value="87" calcext:value-type="float">
            <text:p>87</text:p>
          </table:table-cell>
          <table:table-cell table:style-name="ce11" office:value-type="float" office:value="341" calcext:value-type="float">
            <text:p>341</text:p>
          </table:table-cell>
          <table:table-cell table:style-name="ce21" office:value-type="string" calcext:value-type="string">
            <text:p>1-48</text:p>
          </table:table-cell>
          <table:table-cell table:style-name="ce21" office:value-type="float" office:value="48" calcext:value-type="float">
            <text:p>48</text:p>
          </table:table-cell>
          <table:table-cell table:style-name="ce11" office:value-type="string" calcext:value-type="string">
            <text:p>円形闘技場</text:p>
          </table:table-cell>
          <table:table-cell table:style-name="ce11" table:formula="of:=[.E88]" office:value-type="string" office:string-value="円形闘技場" calcext:value-type="string">
            <text:p>円形闘技場</text:p>
          </table:table-cell>
          <table:table-cell table:style-name="ce11" office:value-type="string" calcext:value-type="string">
            <text:p>えんけいとうぎじょう</text:p>
          </table:table-cell>
          <table:table-cell table:style-name="ce11" office:value-type="string" calcext:value-type="string">
            <text:p>第１弾ブースターパック</text:p>
          </table:table-cell>
          <table:table-cell table:style-name="ce11" table:formula="of:=VLOOKUP([.H88];[$収録番号.$A$1:$収録番号.$B$10];2;0)" office:value-type="float" office:value="15" calcext:value-type="float">
            <text:p>15</text:p>
          </table:table-cell>
          <table:table-cell table:style-name="ce11" office:value-type="string" calcext:value-type="string">
            <text:p>N</text:p>
          </table:table-cell>
          <table:table-cell table:style-name="ce11" table:formula="of:=VLOOKUP([.J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8];[$種類番号.$A$1:$種類番号.$B$4];2;0)" office:value-type="float" office:value="2" calcext:value-type="float">
            <text:p>2</text:p>
          </table:table-cell>
          <table:table-cell table:style-name="ce11" office:value-type="string" calcext:value-type="string">
            <text:p>青</text:p>
          </table:table-cell>
          <table:table-cell table:style-name="ce11" table:formula="of:=VLOOKUP([.N88];[$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88];[$特性番号.$A$1:$特性番号.$B$8];2;0);0)" office:value-type="float" office:value="0" calcext:value-type="float">
            <text:p>0</text:p>
          </table:table-cell>
          <table:table-cell table:style-name="ce11" office:value-type="string" calcext:value-type="string">
            <text:p>自分のターンの間、自分の戦場のガーディアンは「即応」を持つパワー3000のイジンでもあ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8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8.png</text:p>
          </table:table-cell>
          <table:table-cell table:style-name="ce11" table:formula="of:=CONCATENATE([$JSON.$A$1];[.$C88];[$JSON.$B$1];[.$E88];[$JSON.$C$1];[.F88];[$JSON.$D$1];[.$G88];[$JSON.$E$1];IF(ISNA([.$T88]);&quot;null&quot;;&quot;&quot;&quot;&quot;&amp;[.$T88]&amp;&quot;&quot;&quot;&quot;);[$JSON.$F$1];[.$V88];[$JSON.$G$1];IF(ISNA([.$X88]);&quot;null&quot;;&quot;&quot;&quot;&quot;&amp;[.$X88]&amp;&quot;&quot;&quot;&quot;);[$JSON.$H$1];[.$AA88];[$JSON.$I$1];[.$I88];[$JSON.$J$1];[.K88];[$JSON.$K$1];[.$M88];[$JSON.$L$1];[.$P88];[$JSON.$M$1];[.$O88];[$JSON.$N$1];[.$S88];[$JSON.$O$1];[.$U88];[$JSON.$P$1];IF(ISNA([.$W88]);&quot;null&quot;;[.$W88]);[$JSON.$Q$1];[.$Y88];[$JSON.$R$1];IF([.$Z88];&quot;true&quot;;&quot;false&quot;);[$JSON.$S$1];[.$A88];[$JSON.$T$1];[.$B88];[$JSON.$U$1])" office:value-type="string" office:string-value="{&quot;id&quot;:&quot;1-48&quot;,&quot;name&quot;:&quot;円形闘技場&quot;,&quot;displayName&quot;:&quot;円形闘技場&quot;,&quot;kana&quot;:&quot;えんけいとうぎじょう&quot;,&quot;traitText&quot;:null,&quot;ruleText&quot;:&quot;自分のターンの間、自分の戦場のガーディアンは「即応」を持つパワー3000のイジンでもある。&quot;,&quot;legacyText&quot;:null,&quot;imageUrl&quot;:&quot;https://one-draw.jp/ijinden/cardlist/001/card/01_048.png&quot;,&quot;expansion&quot;:15,&quot;rarity&quot;:1,&quot;type&quot;:2,&quot;level&quot;:5,&quot;color&quot;:2,&quot;term&quot;:0,&quot;trait&quot;:0,&quot;power&quot;:null,&quot;legacy&quot;:0,&quot;anyNumCopies&quot;:false,&quot;orderTable&quot;:87,&quot;orderDeck&quot;:341}," calcext:value-type="string">
            <text:p>{"id":"1-48","name":"円形闘技場","displayName":"円形闘技場","kana":"えんけいとうぎじょう","traitText":null,"ruleText":"自分のターンの間、自分の戦場のガーディアンは「即応」を持つパワー3000のイジンでもある。","legacyText":null,"imageUrl":"https://one-draw.jp/ijinden/cardlist/001/card/01_048.png","expansion":15,"rarity":1,"type":2,"level":5,"color":2,"term":0,"trait":0,"power":null,"legacy":0,"anyNumCopies":false,"orderTable":87,"orderDeck":341},</text:p>
          </table:table-cell>
          <table:table-cell table:number-columns-repeated="16356"/>
        </table:table-row>
        <table:table-row table:style-name="ro2">
          <table:table-cell table:style-name="ce11" office:value-type="float" office:value="88" calcext:value-type="float">
            <text:p>88</text:p>
          </table:table-cell>
          <table:table-cell table:style-name="ce11" office:value-type="float" office:value="309" calcext:value-type="float">
            <text:p>309</text:p>
          </table:table-cell>
          <table:table-cell table:style-name="ce21" office:value-type="string" calcext:value-type="string">
            <text:p>1-49</text:p>
          </table:table-cell>
          <table:table-cell table:style-name="ce21" office:value-type="float" office:value="49" calcext:value-type="float">
            <text:p>49</text:p>
          </table:table-cell>
          <table:table-cell table:style-name="ce11" office:value-type="string" calcext:value-type="string">
            <text:p>巨大古墳</text:p>
          </table:table-cell>
          <table:table-cell table:style-name="ce11" table:formula="of:=[.E89]" office:value-type="string" office:string-value="巨大古墳" calcext:value-type="string">
            <text:p>巨大古墳</text:p>
          </table:table-cell>
          <table:table-cell table:style-name="ce11" office:value-type="string" calcext:value-type="string">
            <text:p>きょだいこふん</text:p>
          </table:table-cell>
          <table:table-cell table:style-name="ce11" office:value-type="string" calcext:value-type="string">
            <text:p>第１弾ブースターパック</text:p>
          </table:table-cell>
          <table:table-cell table:style-name="ce11" table:formula="of:=VLOOKUP([.H89];[$収録番号.$A$1:$収録番号.$B$10];2;0)" office:value-type="float" office:value="15" calcext:value-type="float">
            <text:p>15</text:p>
          </table:table-cell>
          <table:table-cell table:style-name="ce11" office:value-type="string" calcext:value-type="string">
            <text:p>N</text:p>
          </table:table-cell>
          <table:table-cell table:style-name="ce11" table:formula="of:=VLOOKUP([.J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89];[$種類番号.$A$1:$種類番号.$B$4];2;0)" office:value-type="float" office:value="2" calcext:value-type="float">
            <text:p>2</text:p>
          </table:table-cell>
          <table:table-cell table:style-name="ce11" office:value-type="string" calcext:value-type="string">
            <text:p>緑</text:p>
          </table:table-cell>
          <table:table-cell table:style-name="ce11" table:formula="of:=VLOOKUP([.N8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8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89];[$特性番号.$A$1:$特性番号.$B$8];2;0);0)" office:value-type="float" office:value="0" calcext:value-type="float">
            <text:p>0</text:p>
          </table:table-cell>
          <table:table-cell table:style-name="ce11" office:value-type="string" calcext:value-type="string">
            <text:p>自分のスタートフェイズが終了したとき、マリョク配置権+1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8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49.png</text:p>
          </table:table-cell>
          <table:table-cell table:style-name="ce11" table:formula="of:=CONCATENATE([$JSON.$A$1];[.$C89];[$JSON.$B$1];[.$E89];[$JSON.$C$1];[.F89];[$JSON.$D$1];[.$G89];[$JSON.$E$1];IF(ISNA([.$T89]);&quot;null&quot;;&quot;&quot;&quot;&quot;&amp;[.$T89]&amp;&quot;&quot;&quot;&quot;);[$JSON.$F$1];[.$V89];[$JSON.$G$1];IF(ISNA([.$X89]);&quot;null&quot;;&quot;&quot;&quot;&quot;&amp;[.$X89]&amp;&quot;&quot;&quot;&quot;);[$JSON.$H$1];[.$AA89];[$JSON.$I$1];[.$I89];[$JSON.$J$1];[.K89];[$JSON.$K$1];[.$M89];[$JSON.$L$1];[.$P89];[$JSON.$M$1];[.$O89];[$JSON.$N$1];[.$S89];[$JSON.$O$1];[.$U89];[$JSON.$P$1];IF(ISNA([.$W89]);&quot;null&quot;;[.$W89]);[$JSON.$Q$1];[.$Y89];[$JSON.$R$1];IF([.$Z89];&quot;true&quot;;&quot;false&quot;);[$JSON.$S$1];[.$A89];[$JSON.$T$1];[.$B89];[$JSON.$U$1])" office:value-type="string" office:string-value="{&quot;id&quot;:&quot;1-49&quot;,&quot;name&quot;:&quot;巨大古墳&quot;,&quot;displayName&quot;:&quot;巨大古墳&quot;,&quot;kana&quot;:&quot;きょだいこふん&quot;,&quot;traitText&quot;:null,&quot;ruleText&quot;:&quot;自分のスタートフェイズが終了したとき、マリョク配置権+1する。&quot;,&quot;legacyText&quot;:&quot;魔力化&quot;,&quot;imageUrl&quot;:&quot;https://one-draw.jp/ijinden/cardlist/001/card/01_049.png&quot;,&quot;expansion&quot;:15,&quot;rarity&quot;:1,&quot;type&quot;:2,&quot;level&quot;:2,&quot;color&quot;:4,&quot;term&quot;:0,&quot;trait&quot;:0,&quot;power&quot;:null,&quot;legacy&quot;:1,&quot;anyNumCopies&quot;:false,&quot;orderTable&quot;:88,&quot;orderDeck&quot;:309}," calcext:value-type="string">
            <text:p>{"id":"1-49","name":"巨大古墳","displayName":"巨大古墳","kana":"きょだいこふん","traitText":null,"ruleText":"自分のスタートフェイズが終了したとき、マリョク配置権+1する。","legacyText":"魔力化","imageUrl":"https://one-draw.jp/ijinden/cardlist/001/card/01_049.png","expansion":15,"rarity":1,"type":2,"level":2,"color":4,"term":0,"trait":0,"power":null,"legacy":1,"anyNumCopies":false,"orderTable":88,"orderDeck":309},</text:p>
          </table:table-cell>
          <table:table-cell table:number-columns-repeated="16356"/>
        </table:table-row>
        <table:table-row table:style-name="ro2">
          <table:table-cell table:style-name="ce11" office:value-type="float" office:value="89" calcext:value-type="float">
            <text:p>89</text:p>
          </table:table-cell>
          <table:table-cell table:style-name="ce11" office:value-type="float" office:value="322" calcext:value-type="float">
            <text:p>322</text:p>
          </table:table-cell>
          <table:table-cell table:style-name="ce21" office:value-type="string" calcext:value-type="string">
            <text:p>1-50</text:p>
          </table:table-cell>
          <table:table-cell table:style-name="ce21" office:value-type="float" office:value="50" calcext:value-type="float">
            <text:p>50</text:p>
          </table:table-cell>
          <table:table-cell table:style-name="ce11" office:value-type="string" calcext:value-type="string">
            <text:p>魔除けの社</text:p>
          </table:table-cell>
          <table:table-cell table:style-name="ce11" table:formula="of:=[.E90]" office:value-type="string" office:string-value="魔除けの社" calcext:value-type="string">
            <text:p>魔除けの社</text:p>
          </table:table-cell>
          <table:table-cell table:style-name="ce11" office:value-type="string" calcext:value-type="string">
            <text:p>まよけのやしろ</text:p>
          </table:table-cell>
          <table:table-cell table:style-name="ce11" office:value-type="string" calcext:value-type="string">
            <text:p>第１弾ブースターパック</text:p>
          </table:table-cell>
          <table:table-cell table:style-name="ce11" table:formula="of:=VLOOKUP([.H90];[$収録番号.$A$1:$収録番号.$B$10];2;0)" office:value-type="float" office:value="15" calcext:value-type="float">
            <text:p>15</text:p>
          </table:table-cell>
          <table:table-cell table:style-name="ce11" office:value-type="string" calcext:value-type="string">
            <text:p>N</text:p>
          </table:table-cell>
          <table:table-cell table:style-name="ce11" table:formula="of:=VLOOKUP([.J9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90];[$種類番号.$A$1:$種類番号.$B$4];2;0)" office:value-type="float" office:value="2" calcext:value-type="float">
            <text:p>2</text:p>
          </table:table-cell>
          <table:table-cell table:style-name="ce11" office:value-type="string" calcext:value-type="string">
            <text:p>緑</text:p>
          </table:table-cell>
          <table:table-cell table:style-name="ce11" table:formula="of:=VLOOKUP([.N9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90];[$特性番号.$A$1:$特性番号.$B$8];2;0);0)" office:value-type="float" office:value="0" calcext:value-type="float">
            <text:p>0</text:p>
          </table:table-cell>
          <table:table-cell table:style-name="ce11" office:value-type="string" calcext:value-type="string">
            <text:p>バトル解決に際し、自分の戦場のガーディアンがブロッカーに含まれているなら、パワー4000以下のアタッカーは破壊され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9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0.png</text:p>
          </table:table-cell>
          <table:table-cell table:style-name="ce11" table:formula="of:=CONCATENATE([$JSON.$A$1];[.$C90];[$JSON.$B$1];[.$E90];[$JSON.$C$1];[.F90];[$JSON.$D$1];[.$G90];[$JSON.$E$1];IF(ISNA([.$T90]);&quot;null&quot;;&quot;&quot;&quot;&quot;&amp;[.$T90]&amp;&quot;&quot;&quot;&quot;);[$JSON.$F$1];[.$V90];[$JSON.$G$1];IF(ISNA([.$X90]);&quot;null&quot;;&quot;&quot;&quot;&quot;&amp;[.$X90]&amp;&quot;&quot;&quot;&quot;);[$JSON.$H$1];[.$AA90];[$JSON.$I$1];[.$I90];[$JSON.$J$1];[.K90];[$JSON.$K$1];[.$M90];[$JSON.$L$1];[.$P90];[$JSON.$M$1];[.$O90];[$JSON.$N$1];[.$S90];[$JSON.$O$1];[.$U90];[$JSON.$P$1];IF(ISNA([.$W90]);&quot;null&quot;;[.$W90]);[$JSON.$Q$1];[.$Y90];[$JSON.$R$1];IF([.$Z90];&quot;true&quot;;&quot;false&quot;);[$JSON.$S$1];[.$A90];[$JSON.$T$1];[.$B90];[$JSON.$U$1])" office:value-type="string" office:string-value="{&quot;id&quot;:&quot;1-50&quot;,&quot;name&quot;:&quot;魔除けの社&quot;,&quot;displayName&quot;:&quot;魔除けの社&quot;,&quot;kana&quot;:&quot;まよけのやしろ&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rarity&quot;:1,&quot;type&quot;:2,&quot;level&quot;:3,&quot;color&quot;:4,&quot;term&quot;:0,&quot;trait&quot;:0,&quot;power&quot;:null,&quot;legacy&quot;:1,&quot;anyNumCopies&quot;:false,&quot;orderTable&quot;:89,&quot;orderDeck&quot;:322}," calcext:value-type="string">
            <text:p>{"id":"1-50","name":"魔除けの社","displayName":"魔除けの社","kana":"まよけのやしろ","traitText":null,"ruleText":"バトル解決に際し、自分の戦場のガーディアンがブロッカーに含まれているなら、パワー4000以下のアタッカーは破壊される。","legacyText":"魔力化","imageUrl":"https://one-draw.jp/ijinden/cardlist/001/card/01_050.png","expansion":15,"rarity":1,"type":2,"level":3,"color":4,"term":0,"trait":0,"power":null,"legacy":1,"anyNumCopies":false,"orderTable":89,"orderDeck":322},</text:p>
          </table:table-cell>
          <table:table-cell table:number-columns-repeated="16356"/>
        </table:table-row>
        <table:table-row table:style-name="ro2">
          <table:table-cell table:style-name="ce11" office:value-type="float" office:value="90" calcext:value-type="float">
            <text:p>90</text:p>
          </table:table-cell>
          <table:table-cell table:style-name="ce11" office:value-type="float" office:value="343" calcext:value-type="float">
            <text:p>343</text:p>
          </table:table-cell>
          <table:table-cell table:style-name="ce21" office:value-type="string" calcext:value-type="string">
            <text:p>1-51</text:p>
          </table:table-cell>
          <table:table-cell table:style-name="ce21" office:value-type="float" office:value="51" calcext:value-type="float">
            <text:p>51</text:p>
          </table:table-cell>
          <table:table-cell table:style-name="ce11" office:value-type="string" calcext:value-type="string">
            <text:p>冨嶽三十六景</text:p>
          </table:table-cell>
          <table:table-cell table:style-name="ce11" table:formula="of:=[.E91]" office:value-type="string" office:string-value="冨嶽三十六景" calcext:value-type="string">
            <text:p>冨嶽三十六景</text:p>
          </table:table-cell>
          <table:table-cell table:style-name="ce11" office:value-type="string" calcext:value-type="string">
            <text:p>ふがくさんじゅうろっけい</text:p>
          </table:table-cell>
          <table:table-cell table:style-name="ce11" office:value-type="string" calcext:value-type="string">
            <text:p>第１弾ブースターパック</text:p>
          </table:table-cell>
          <table:table-cell table:style-name="ce11" table:formula="of:=VLOOKUP([.H91];[$収録番号.$A$1:$収録番号.$B$10];2;0)" office:value-type="float" office:value="15" calcext:value-type="float">
            <text:p>15</text:p>
          </table:table-cell>
          <table:table-cell table:style-name="ce11" office:value-type="string" calcext:value-type="string">
            <text:p>N</text:p>
          </table:table-cell>
          <table:table-cell table:style-name="ce11" table:formula="of:=VLOOKUP([.J9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91];[$種類番号.$A$1:$種類番号.$B$4];2;0)" office:value-type="float" office:value="2" calcext:value-type="float">
            <text:p>2</text:p>
          </table:table-cell>
          <table:table-cell table:style-name="ce11" office:value-type="string" calcext:value-type="string">
            <text:p>緑</text:p>
          </table:table-cell>
          <table:table-cell table:style-name="ce11" table:formula="of:=VLOOKUP([.N91];[$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1];[$能力語番号.$A$1:$能力語番号.$B$11];2;0);0)" office:value-type="float" office:value="0" calcext:value-type="float">
            <text:p>0</text:p>
          </table:table-cell>
          <table:table-cell office:value-type="string" calcext:value-type="string">
            <text:p>美術</text:p>
          </table:table-cell>
          <table:table-cell table:style-name="ce11" table:formula="of:=IFERROR(VLOOKUP([.$T91];[$特性番号.$A$1:$特性番号.$B$8];2;0);0)" office:value-type="float" office:value="2" calcext:value-type="float">
            <text:p>2</text:p>
          </table:table-cell>
          <table:table-cell table:style-name="ce11" office:value-type="string" calcext:value-type="string">
            <text:p>自分のメインフェイズが開始したとき、遺業能力を持つ墓地のハイケイ1つを指定して発動できる。そのハイケイを戦場に置く。</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1.png</text:p>
          </table:table-cell>
          <table:table-cell table:style-name="ce11" table:formula="of:=CONCATENATE([$JSON.$A$1];[.$C91];[$JSON.$B$1];[.$E91];[$JSON.$C$1];[.F91];[$JSON.$D$1];[.$G91];[$JSON.$E$1];IF(ISNA([.$T91]);&quot;null&quot;;&quot;&quot;&quot;&quot;&amp;[.$T91]&amp;&quot;&quot;&quot;&quot;);[$JSON.$F$1];[.$V91];[$JSON.$G$1];IF(ISNA([.$X91]);&quot;null&quot;;&quot;&quot;&quot;&quot;&amp;[.$X91]&amp;&quot;&quot;&quot;&quot;);[$JSON.$H$1];[.$AA91];[$JSON.$I$1];[.$I91];[$JSON.$J$1];[.K91];[$JSON.$K$1];[.$M91];[$JSON.$L$1];[.$P91];[$JSON.$M$1];[.$O91];[$JSON.$N$1];[.$S91];[$JSON.$O$1];[.$U91];[$JSON.$P$1];IF(ISNA([.$W91]);&quot;null&quot;;[.$W91]);[$JSON.$Q$1];[.$Y91];[$JSON.$R$1];IF([.$Z91];&quot;true&quot;;&quot;false&quot;);[$JSON.$S$1];[.$A91];[$JSON.$T$1];[.$B91];[$JSON.$U$1])" office:value-type="string" office:string-value="{&quot;id&quot;:&quot;1-51&quot;,&quot;name&quot;:&quot;冨嶽三十六景&quot;,&quot;displayName&quot;:&quot;冨嶽三十六景&quot;,&quot;kana&quot;:&quot;ふがくさんじゅうろっけい&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rarity&quot;:1,&quot;type&quot;:2,&quot;level&quot;:5,&quot;color&quot;:4,&quot;term&quot;:0,&quot;trait&quot;:2,&quot;power&quot;:null,&quot;legacy&quot;:0,&quot;anyNumCopies&quot;:false,&quot;orderTable&quot;:90,&quot;orderDeck&quot;:343}," calcext:value-type="string">
            <text:p>{"id":"1-51","name":"冨嶽三十六景","displayName":"冨嶽三十六景","kana":"ふがくさんじゅうろっけい","traitText":"美術","ruleText":"自分のメインフェイズが開始したとき、遺業能力を持つ墓地のハイケイ1つを指定して発動できる。そのハイケイを戦場に置く。","legacyText":null,"imageUrl":"https://one-draw.jp/ijinden/cardlist/001/card/01_051.png","expansion":15,"rarity":1,"type":2,"level":5,"color":4,"term":0,"trait":2,"power":null,"legacy":0,"anyNumCopies":false,"orderTable":90,"orderDeck":343},</text:p>
          </table:table-cell>
          <table:table-cell table:number-columns-repeated="16356"/>
        </table:table-row>
        <table:table-row table:style-name="ro2">
          <table:table-cell table:style-name="ce11" office:value-type="float" office:value="91" calcext:value-type="float">
            <text:p>91</text:p>
          </table:table-cell>
          <table:table-cell table:style-name="ce11" office:value-type="float" office:value="383" calcext:value-type="float">
            <text:p>383</text:p>
          </table:table-cell>
          <table:table-cell table:style-name="ce21" office:value-type="string" calcext:value-type="string">
            <text:p>1-52</text:p>
          </table:table-cell>
          <table:table-cell table:style-name="ce21" office:value-type="float" office:value="52" calcext:value-type="float">
            <text:p>52</text:p>
          </table:table-cell>
          <table:table-cell table:style-name="ce11" office:value-type="string" calcext:value-type="string">
            <text:p>バレット</text:p>
          </table:table-cell>
          <table:table-cell table:style-name="ce11" table:formula="of:=[.E92]" office:value-type="string" office:string-value="バレット" calcext:value-type="string">
            <text:p>バレット</text:p>
          </table:table-cell>
          <table:table-cell table:style-name="ce11" office:value-type="string" calcext:value-type="string">
            <text:p>ばれっと</text:p>
          </table:table-cell>
          <table:table-cell table:style-name="ce11" office:value-type="string" calcext:value-type="string">
            <text:p>第１弾ブースターパック</text:p>
          </table:table-cell>
          <table:table-cell table:style-name="ce11" table:formula="of:=VLOOKUP([.H92];[$収録番号.$A$1:$収録番号.$B$10];2;0)" office:value-type="float" office:value="15" calcext:value-type="float">
            <text:p>15</text:p>
          </table:table-cell>
          <table:table-cell table:style-name="ce11" office:value-type="string" calcext:value-type="string">
            <text:p>N</text:p>
          </table:table-cell>
          <table:table-cell table:style-name="ce11" table:formula="of:=VLOOKUP([.J9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2];[$種類番号.$A$1:$種類番号.$B$4];2;0)" office:value-type="float" office:value="3" calcext:value-type="float">
            <text:p>3</text:p>
          </table:table-cell>
          <table:table-cell table:style-name="ce11" office:value-type="string" calcext:value-type="string">
            <text:p>赤</text:p>
          </table:table-cell>
          <table:table-cell table:style-name="ce11" table:formula="of:=VLOOKUP([.N9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9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92];[$特性番号.$A$1:$特性番号.$B$8];2;0);0)" office:value-type="float" office:value="0" calcext:value-type="float">
            <text:p>0</text:p>
          </table:table-cell>
          <table:table-cell table:style-name="ce11" office:value-type="string" calcext:value-type="string">
            <text:p>自分の戦場のイジン1体と相手の戦場のイジン1体を指定して発動できる。それらの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2.png</text:p>
          </table:table-cell>
          <table:table-cell table:style-name="ce11" table:formula="of:=CONCATENATE([$JSON.$A$1];[.$C92];[$JSON.$B$1];[.$E92];[$JSON.$C$1];[.F92];[$JSON.$D$1];[.$G92];[$JSON.$E$1];IF(ISNA([.$T92]);&quot;null&quot;;&quot;&quot;&quot;&quot;&amp;[.$T92]&amp;&quot;&quot;&quot;&quot;);[$JSON.$F$1];[.$V92];[$JSON.$G$1];IF(ISNA([.$X92]);&quot;null&quot;;&quot;&quot;&quot;&quot;&amp;[.$X92]&amp;&quot;&quot;&quot;&quot;);[$JSON.$H$1];[.$AA92];[$JSON.$I$1];[.$I92];[$JSON.$J$1];[.K92];[$JSON.$K$1];[.$M92];[$JSON.$L$1];[.$P92];[$JSON.$M$1];[.$O92];[$JSON.$N$1];[.$S92];[$JSON.$O$1];[.$U92];[$JSON.$P$1];IF(ISNA([.$W92]);&quot;null&quot;;[.$W92]);[$JSON.$Q$1];[.$Y92];[$JSON.$R$1];IF([.$Z92];&quot;true&quot;;&quot;false&quot;);[$JSON.$S$1];[.$A92];[$JSON.$T$1];[.$B92];[$JSON.$U$1])" office:value-type="string" office:string-value="{&quot;id&quot;:&quot;1-52&quot;,&quot;name&quot;:&quot;バレット&quot;,&quot;displayName&quot;:&quot;バレット&quot;,&quot;kana&quot;:&quot;ばれっと&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rarity&quot;:1,&quot;type&quot;:3,&quot;level&quot;:3,&quot;color&quot;:1,&quot;term&quot;:0,&quot;trait&quot;:0,&quot;power&quot;:null,&quot;legacy&quot;:2,&quot;anyNumCopies&quot;:false,&quot;orderTable&quot;:91,&quot;orderDeck&quot;:383}," calcext:value-type="string">
            <text:p>{"id":"1-52","name":"バレット","displayName":"バレット","kana":"ばれっと","traitText":null,"ruleText":"自分の戦場のイジン1体と相手の戦場のイジン1体を指定して発動できる。それらのイジンすべてを破壊する。","legacyText":"冥府発動","imageUrl":"https://one-draw.jp/ijinden/cardlist/001/card/01_052.png","expansion":15,"rarity":1,"type":3,"level":3,"color":1,"term":0,"trait":0,"power":null,"legacy":2,"anyNumCopies":false,"orderTable":91,"orderDeck":383},</text:p>
          </table:table-cell>
          <table:table-cell table:number-columns-repeated="16356"/>
        </table:table-row>
        <table:table-row table:style-name="ro2">
          <table:table-cell table:style-name="ce11" office:value-type="float" office:value="92" calcext:value-type="float">
            <text:p>92</text:p>
          </table:table-cell>
          <table:table-cell table:style-name="ce11" office:value-type="float" office:value="402" calcext:value-type="float">
            <text:p>402</text:p>
          </table:table-cell>
          <table:table-cell table:style-name="ce21" office:value-type="string" calcext:value-type="string">
            <text:p>1-53</text:p>
          </table:table-cell>
          <table:table-cell table:style-name="ce21" office:value-type="float" office:value="53" calcext:value-type="float">
            <text:p>53</text:p>
          </table:table-cell>
          <table:table-cell table:style-name="ce11" office:value-type="string" calcext:value-type="string">
            <text:p>チャンピオン</text:p>
          </table:table-cell>
          <table:table-cell table:style-name="ce11" table:formula="of:=[.E93]" office:value-type="string" office:string-value="チャンピオン" calcext:value-type="string">
            <text:p>チャンピオン</text:p>
          </table:table-cell>
          <table:table-cell table:style-name="ce11" office:value-type="string" calcext:value-type="string">
            <text:p>ちゃんぴおん</text:p>
          </table:table-cell>
          <table:table-cell table:style-name="ce11" office:value-type="string" calcext:value-type="string">
            <text:p>第１弾ブースターパック</text:p>
          </table:table-cell>
          <table:table-cell table:style-name="ce11" table:formula="of:=VLOOKUP([.H93];[$収録番号.$A$1:$収録番号.$B$10];2;0)" office:value-type="float" office:value="15" calcext:value-type="float">
            <text:p>15</text:p>
          </table:table-cell>
          <table:table-cell table:style-name="ce11" office:value-type="string" calcext:value-type="string">
            <text:p>R</text:p>
          </table:table-cell>
          <table:table-cell table:style-name="ce11" table:formula="of:=VLOOKUP([.J93];[$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3];[$種類番号.$A$1:$種類番号.$B$4];2;0)" office:value-type="float" office:value="3" calcext:value-type="float">
            <text:p>3</text:p>
          </table:table-cell>
          <table:table-cell table:style-name="ce11" office:value-type="string" calcext:value-type="string">
            <text:p>赤</text:p>
          </table:table-cell>
          <table:table-cell table:style-name="ce11" table:formula="of:=VLOOKUP([.N93];[$色番号.$A$1:$色番号.$B$10];2;0)" office:value-type="float" office:value="1" calcext:value-type="float">
            <text:p>1</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9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93];[$特性番号.$A$1:$特性番号.$B$8];2;0);0)" office:value-type="float" office:value="0" calcext:value-type="float">
            <text:p>0</text:p>
          </table:table-cell>
          <table:table-cell table:style-name="ce11" office:value-type="string" calcext:value-type="string">
            <text:p>自分の戦場のイジン1体を指定して発動できる。そのイジンは、このターンの間「イジンにブロックされない」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3.png</text:p>
          </table:table-cell>
          <table:table-cell table:style-name="ce11" table:formula="of:=CONCATENATE([$JSON.$A$1];[.$C93];[$JSON.$B$1];[.$E93];[$JSON.$C$1];[.F93];[$JSON.$D$1];[.$G93];[$JSON.$E$1];IF(ISNA([.$T93]);&quot;null&quot;;&quot;&quot;&quot;&quot;&amp;[.$T93]&amp;&quot;&quot;&quot;&quot;);[$JSON.$F$1];[.$V93];[$JSON.$G$1];IF(ISNA([.$X93]);&quot;null&quot;;&quot;&quot;&quot;&quot;&amp;[.$X93]&amp;&quot;&quot;&quot;&quot;);[$JSON.$H$1];[.$AA93];[$JSON.$I$1];[.$I93];[$JSON.$J$1];[.K93];[$JSON.$K$1];[.$M93];[$JSON.$L$1];[.$P93];[$JSON.$M$1];[.$O93];[$JSON.$N$1];[.$S93];[$JSON.$O$1];[.$U93];[$JSON.$P$1];IF(ISNA([.$W93]);&quot;null&quot;;[.$W93]);[$JSON.$Q$1];[.$Y93];[$JSON.$R$1];IF([.$Z93];&quot;true&quot;;&quot;false&quot;);[$JSON.$S$1];[.$A93];[$JSON.$T$1];[.$B93];[$JSON.$U$1])" office:value-type="string" office:string-value="{&quot;id&quot;:&quot;1-53&quot;,&quot;name&quot;:&quot;チャンピオン&quot;,&quot;displayName&quot;:&quot;チャンピオン&quot;,&quot;kana&quot;:&quot;ちゃんぴおん&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rarity&quot;:2,&quot;type&quot;:3,&quot;level&quot;:4,&quot;color&quot;:1,&quot;term&quot;:0,&quot;trait&quot;:0,&quot;power&quot;:null,&quot;legacy&quot;:0,&quot;anyNumCopies&quot;:false,&quot;orderTable&quot;:92,&quot;orderDeck&quot;:402}," calcext:value-type="string">
            <text:p>{"id":"1-53","name":"チャンピオン","displayName":"チャンピオン","kana":"ちゃんぴおん","traitText":null,"ruleText":"自分の戦場のイジン1体を指定して発動できる。そのイジンは、このターンの間「イジンにブロックされない」を得る。","legacyText":null,"imageUrl":"https://one-draw.jp/ijinden/cardlist/001/card/01_053.png","expansion":15,"rarity":2,"type":3,"level":4,"color":1,"term":0,"trait":0,"power":null,"legacy":0,"anyNumCopies":false,"orderTable":92,"orderDeck":402},</text:p>
          </table:table-cell>
          <table:table-cell table:number-columns-repeated="16356"/>
        </table:table-row>
        <table:table-row table:style-name="ro2">
          <table:table-cell table:style-name="ce11" office:value-type="float" office:value="93" calcext:value-type="float">
            <text:p>93</text:p>
          </table:table-cell>
          <table:table-cell table:style-name="ce11" office:value-type="float" office:value="422" calcext:value-type="float">
            <text:p>422</text:p>
          </table:table-cell>
          <table:table-cell table:style-name="ce21" office:value-type="string" calcext:value-type="string">
            <text:p>1-54</text:p>
          </table:table-cell>
          <table:table-cell table:style-name="ce21" office:value-type="float" office:value="54" calcext:value-type="float">
            <text:p>54</text:p>
          </table:table-cell>
          <table:table-cell table:style-name="ce11" office:value-type="string" calcext:value-type="string">
            <text:p>ファイナルアタック</text:p>
          </table:table-cell>
          <table:table-cell table:style-name="ce11" table:formula="of:=[.E94]" office:value-type="string" office:string-value="ファイナルアタック" calcext:value-type="string">
            <text:p>ファイナルアタック</text:p>
          </table:table-cell>
          <table:table-cell table:style-name="ce11" office:value-type="string" calcext:value-type="string">
            <text:p>ふぁいなるあたっく</text:p>
          </table:table-cell>
          <table:table-cell table:style-name="ce11" office:value-type="string" calcext:value-type="string">
            <text:p>第１弾ブースターパック</text:p>
          </table:table-cell>
          <table:table-cell table:style-name="ce11" table:formula="of:=VLOOKUP([.H94];[$収録番号.$A$1:$収録番号.$B$10];2;0)" office:value-type="float" office:value="15" calcext:value-type="float">
            <text:p>15</text:p>
          </table:table-cell>
          <table:table-cell table:style-name="ce11" office:value-type="string" calcext:value-type="string">
            <text:p>N</text:p>
          </table:table-cell>
          <table:table-cell table:style-name="ce11" table:formula="of:=VLOOKUP([.J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4];[$種類番号.$A$1:$種類番号.$B$4];2;0)" office:value-type="float" office:value="3" calcext:value-type="float">
            <text:p>3</text:p>
          </table:table-cell>
          <table:table-cell table:style-name="ce11" office:value-type="string" calcext:value-type="string">
            <text:p>赤</text:p>
          </table:table-cell>
          <table:table-cell table:style-name="ce11" table:formula="of:=VLOOKUP([.N94];[$色番号.$A$1:$色番号.$B$10];2;0)" office:value-type="float" office:value="1" calcext:value-type="float">
            <text:p>1</text:p>
          </table:table-cell>
          <table:table-cell table:style-name="ce11" office:value-type="float" office:value="6" calcext:value-type="float">
            <text:p>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IFERROR(VLOOKUP([.$R9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94];[$特性番号.$A$1:$特性番号.$B$8];2;0);0)" office:value-type="float" office:value="0" calcext:value-type="float">
            <text:p>0</text:p>
          </table:table-cell>
          <table:table-cell table:style-name="ce11" office:value-type="string" calcext:value-type="string">
            <text:p>次のエンドフェイズが開始したとき、ゲームに敗北する。¶自分の戦場のイジンすべてを起こして、追加でバトル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4.png</text:p>
          </table:table-cell>
          <table:table-cell table:style-name="ce11" table:formula="of:=CONCATENATE([$JSON.$A$1];[.$C94];[$JSON.$B$1];[.$E94];[$JSON.$C$1];[.F94];[$JSON.$D$1];[.$G94];[$JSON.$E$1];IF(ISNA([.$T94]);&quot;null&quot;;&quot;&quot;&quot;&quot;&amp;[.$T94]&amp;&quot;&quot;&quot;&quot;);[$JSON.$F$1];[.$V94];[$JSON.$G$1];IF(ISNA([.$X94]);&quot;null&quot;;&quot;&quot;&quot;&quot;&amp;[.$X94]&amp;&quot;&quot;&quot;&quot;);[$JSON.$H$1];[.$AA94];[$JSON.$I$1];[.$I94];[$JSON.$J$1];[.K94];[$JSON.$K$1];[.$M94];[$JSON.$L$1];[.$P94];[$JSON.$M$1];[.$O94];[$JSON.$N$1];[.$S94];[$JSON.$O$1];[.$U94];[$JSON.$P$1];IF(ISNA([.$W94]);&quot;null&quot;;[.$W94]);[$JSON.$Q$1];[.$Y94];[$JSON.$R$1];IF([.$Z94];&quot;true&quot;;&quot;false&quot;);[$JSON.$S$1];[.$A94];[$JSON.$T$1];[.$B94];[$JSON.$U$1])" office:value-type="string" office:string-value="{&quot;id&quot;:&quot;1-54&quot;,&quot;name&quot;:&quot;ファイナルアタック&quot;,&quot;displayName&quot;:&quot;ファイナルアタック&quot;,&quot;kana&quot;:&quot;ふぁいなるあたっく&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rarity&quot;:1,&quot;type&quot;:3,&quot;level&quot;:6,&quot;color&quot;:1,&quot;term&quot;:0,&quot;trait&quot;:0,&quot;power&quot;:null,&quot;legacy&quot;:0,&quot;anyNumCopies&quot;:false,&quot;orderTable&quot;:93,&quot;orderDeck&quot;:422}," calcext:value-type="string">
            <text:p>{"id":"1-54","name":"ファイナルアタック","displayName":"ファイナルアタック","kana":"ふぁいなるあたっく","traitText":null,"ruleText":"次のエンドフェイズが開始したとき、ゲームに敗北する。¶自分の戦場のイジンすべてを起こして、追加でバトルする。","legacyText":null,"imageUrl":"https://one-draw.jp/ijinden/cardlist/001/card/01_054.png","expansion":15,"rarity":1,"type":3,"level":6,"color":1,"term":0,"trait":0,"power":null,"legacy":0,"anyNumCopies":false,"orderTable":93,"orderDeck":422},</text:p>
          </table:table-cell>
          <table:table-cell table:number-columns-repeated="16356"/>
        </table:table-row>
        <table:table-row table:style-name="ro2">
          <table:table-cell table:style-name="ce11" office:value-type="float" office:value="94" calcext:value-type="float">
            <text:p>94</text:p>
          </table:table-cell>
          <table:table-cell table:style-name="ce11" office:value-type="float" office:value="373" calcext:value-type="float">
            <text:p>373</text:p>
          </table:table-cell>
          <table:table-cell table:style-name="ce21" office:value-type="string" calcext:value-type="string">
            <text:p>1-55</text:p>
          </table:table-cell>
          <table:table-cell table:style-name="ce21" office:value-type="float" office:value="55" calcext:value-type="float">
            <text:p>55</text:p>
          </table:table-cell>
          <table:table-cell table:style-name="ce11" office:value-type="string" calcext:value-type="string">
            <text:p>ストーム</text:p>
          </table:table-cell>
          <table:table-cell table:style-name="ce11" table:formula="of:=[.E95]" office:value-type="string" office:string-value="ストーム" calcext:value-type="string">
            <text:p>ストーム</text:p>
          </table:table-cell>
          <table:table-cell table:style-name="ce11" office:value-type="string" calcext:value-type="string">
            <text:p>すとーむ</text:p>
          </table:table-cell>
          <table:table-cell table:style-name="ce11" office:value-type="string" calcext:value-type="string">
            <text:p>第１弾ブースターパック</text:p>
          </table:table-cell>
          <table:table-cell table:style-name="ce11" table:formula="of:=VLOOKUP([.H95];[$収録番号.$A$1:$収録番号.$B$10];2;0)" office:value-type="float" office:value="15" calcext:value-type="float">
            <text:p>15</text:p>
          </table:table-cell>
          <table:table-cell table:style-name="ce11" office:value-type="string" calcext:value-type="string">
            <text:p>N</text:p>
          </table:table-cell>
          <table:table-cell table:style-name="ce11" table:formula="of:=VLOOKUP([.J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95];[$種類番号.$A$1:$種類番号.$B$4];2;0)" office:value-type="float" office:value="3" calcext:value-type="float">
            <text:p>3</text:p>
          </table:table-cell>
          <table:table-cell table:style-name="ce11" office:value-type="string" calcext:value-type="string">
            <text:p>青</text:p>
          </table:table-cell>
          <table:table-cell table:style-name="ce11" table:formula="of:=VLOOKUP([.N95];[$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9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95];[$特性番号.$A$1:$特性番号.$B$8];2;0);0)" office:value-type="float" office:value="0" calcext:value-type="float">
            <text:p>0</text:p>
          </table:table-cell>
          <table:table-cell table:style-name="ce11" office:value-type="string" calcext:value-type="string">
            <text:p>戦場のイジン1体を指定して発動できる。そのイジン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5.png</text:p>
          </table:table-cell>
          <table:table-cell table:style-name="ce11" table:formula="of:=CONCATENATE([$JSON.$A$1];[.$C95];[$JSON.$B$1];[.$E95];[$JSON.$C$1];[.F95];[$JSON.$D$1];[.$G95];[$JSON.$E$1];IF(ISNA([.$T95]);&quot;null&quot;;&quot;&quot;&quot;&quot;&amp;[.$T95]&amp;&quot;&quot;&quot;&quot;);[$JSON.$F$1];[.$V95];[$JSON.$G$1];IF(ISNA([.$X95]);&quot;null&quot;;&quot;&quot;&quot;&quot;&amp;[.$X95]&amp;&quot;&quot;&quot;&quot;);[$JSON.$H$1];[.$AA95];[$JSON.$I$1];[.$I95];[$JSON.$J$1];[.K95];[$JSON.$K$1];[.$M95];[$JSON.$L$1];[.$P95];[$JSON.$M$1];[.$O95];[$JSON.$N$1];[.$S95];[$JSON.$O$1];[.$U95];[$JSON.$P$1];IF(ISNA([.$W95]);&quot;null&quot;;[.$W95]);[$JSON.$Q$1];[.$Y95];[$JSON.$R$1];IF([.$Z95];&quot;true&quot;;&quot;false&quot;);[$JSON.$S$1];[.$A95];[$JSON.$T$1];[.$B95];[$JSON.$U$1])" office:value-type="string" office:string-value="{&quot;id&quot;:&quot;1-55&quot;,&quot;name&quot;:&quot;ストーム&quot;,&quot;displayName&quot;:&quot;ストーム&quot;,&quot;kana&quot;:&quot;すとーむ&quot;,&quot;traitText&quot;:null,&quot;ruleText&quot;:&quot;戦場のイジン1体を指定して発動できる。そのイジンを手札に戻す。&quot;,&quot;legacyText&quot;:&quot;冥府発動&quot;,&quot;imageUrl&quot;:&quot;https://one-draw.jp/ijinden/cardlist/001/card/01_055.png&quot;,&quot;expansion&quot;:15,&quot;rarity&quot;:1,&quot;type&quot;:3,&quot;level&quot;:2,&quot;color&quot;:2,&quot;term&quot;:0,&quot;trait&quot;:0,&quot;power&quot;:null,&quot;legacy&quot;:2,&quot;anyNumCopies&quot;:false,&quot;orderTable&quot;:94,&quot;orderDeck&quot;:373}," calcext:value-type="string">
            <text:p>{"id":"1-55","name":"ストーム","displayName":"ストーム","kana":"すとーむ","traitText":null,"ruleText":"戦場のイジン1体を指定して発動できる。そのイジンを手札に戻す。","legacyText":"冥府発動","imageUrl":"https://one-draw.jp/ijinden/cardlist/001/card/01_055.png","expansion":15,"rarity":1,"type":3,"level":2,"color":2,"term":0,"trait":0,"power":null,"legacy":2,"anyNumCopies":false,"orderTable":94,"orderDeck":373},</text:p>
          </table:table-cell>
          <table:table-cell table:number-columns-repeated="16356"/>
        </table:table-row>
        <table:table-row table:style-name="ro2">
          <table:table-cell table:style-name="ce11" office:value-type="float" office:value="95" calcext:value-type="float">
            <text:p>95</text:p>
          </table:table-cell>
          <table:table-cell table:style-name="ce11" office:value-type="float" office:value="403" calcext:value-type="float">
            <text:p>403</text:p>
          </table:table-cell>
          <table:table-cell table:style-name="ce21" office:value-type="string" calcext:value-type="string">
            <text:p>1-56</text:p>
          </table:table-cell>
          <table:table-cell table:style-name="ce21" office:value-type="float" office:value="56" calcext:value-type="float">
            <text:p>56</text:p>
          </table:table-cell>
          <table:table-cell table:style-name="ce11" office:value-type="string" calcext:value-type="string">
            <text:p>リバイバル</text:p>
          </table:table-cell>
          <table:table-cell table:style-name="ce11" table:formula="of:=[.E96]" office:value-type="string" office:string-value="リバイバル" calcext:value-type="string">
            <text:p>リバイバル</text:p>
          </table:table-cell>
          <table:table-cell table:style-name="ce11" office:value-type="string" calcext:value-type="string">
            <text:p>りばいばる</text:p>
          </table:table-cell>
          <table:table-cell table:style-name="ce11" office:value-type="string" calcext:value-type="string">
            <text:p>第１弾ブースターパック</text:p>
          </table:table-cell>
          <table:table-cell table:style-name="ce11" table:formula="of:=VLOOKUP([.H96];[$収録番号.$A$1:$収録番号.$B$10];2;0)" office:value-type="float" office:value="15" calcext:value-type="float">
            <text:p>15</text:p>
          </table:table-cell>
          <table:table-cell table:style-name="ce11" office:value-type="string" calcext:value-type="string">
            <text:p>R</text:p>
          </table:table-cell>
          <table:table-cell table:style-name="ce11" table:formula="of:=VLOOKUP([.J96];[$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6];[$種類番号.$A$1:$種類番号.$B$4];2;0)" office:value-type="float" office:value="3" calcext:value-type="float">
            <text:p>3</text:p>
          </table:table-cell>
          <table:table-cell table:style-name="ce11" office:value-type="string" calcext:value-type="string">
            <text:p>青</text:p>
          </table:table-cell>
          <table:table-cell table:style-name="ce11" table:formula="of:=VLOOKUP([.N96];[$色番号.$A$1:$色番号.$B$10];2;0)" office:value-type="float" office:value="2" calcext:value-type="float">
            <text:p>2</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9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96];[$特性番号.$A$1:$特性番号.$B$8];2;0);0)" office:value-type="float" office:value="0" calcext:value-type="float">
            <text:p>0</text:p>
          </table:table-cell>
          <table:table-cell table:style-name="ce11"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6];[$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6.png</text:p>
          </table:table-cell>
          <table:table-cell table:style-name="ce11" table:formula="of:=CONCATENATE([$JSON.$A$1];[.$C96];[$JSON.$B$1];[.$E96];[$JSON.$C$1];[.F96];[$JSON.$D$1];[.$G96];[$JSON.$E$1];IF(ISNA([.$T96]);&quot;null&quot;;&quot;&quot;&quot;&quot;&amp;[.$T96]&amp;&quot;&quot;&quot;&quot;);[$JSON.$F$1];[.$V96];[$JSON.$G$1];IF(ISNA([.$X96]);&quot;null&quot;;&quot;&quot;&quot;&quot;&amp;[.$X96]&amp;&quot;&quot;&quot;&quot;);[$JSON.$H$1];[.$AA96];[$JSON.$I$1];[.$I96];[$JSON.$J$1];[.K96];[$JSON.$K$1];[.$M96];[$JSON.$L$1];[.$P96];[$JSON.$M$1];[.$O96];[$JSON.$N$1];[.$S96];[$JSON.$O$1];[.$U96];[$JSON.$P$1];IF(ISNA([.$W96]);&quot;null&quot;;[.$W96]);[$JSON.$Q$1];[.$Y96];[$JSON.$R$1];IF([.$Z96];&quot;true&quot;;&quot;false&quot;);[$JSON.$S$1];[.$A96];[$JSON.$T$1];[.$B96];[$JSON.$U$1])" office:value-type="string" office:string-value="{&quot;id&quot;:&quot;1-56&quot;,&quot;name&quot;:&quot;リバイバル&quot;,&quot;displayName&quot;:&quot;リバイバル&quot;,&quot;kana&quot;:&quot;りばいばる&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rarity&quot;:2,&quot;type&quot;:3,&quot;level&quot;:4,&quot;color&quot;:2,&quot;term&quot;:0,&quot;trait&quot;:0,&quot;power&quot;:null,&quot;legacy&quot;:2,&quot;anyNumCopies&quot;:false,&quot;orderTable&quot;:95,&quot;orderDeck&quot;:403}," calcext:value-type="string">
            <text:p>{"id":"1-56","name":"リバイバル","displayName":"リバイバル","kana":"りばいばる","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rarity":2,"type":3,"level":4,"color":2,"term":0,"trait":0,"power":null,"legacy":2,"anyNumCopies":false,"orderTable":95,"orderDeck":403},</text:p>
          </table:table-cell>
          <table:table-cell table:number-columns-repeated="16356"/>
        </table:table-row>
        <table:table-row table:style-name="ro2">
          <table:table-cell table:style-name="ce11" office:value-type="float" office:value="96" calcext:value-type="float">
            <text:p>96</text:p>
          </table:table-cell>
          <table:table-cell table:style-name="ce11" office:value-type="float" office:value="407" calcext:value-type="float">
            <text:p>407</text:p>
          </table:table-cell>
          <table:table-cell table:style-name="ce21" office:value-type="string" calcext:value-type="string">
            <text:p>1-57</text:p>
          </table:table-cell>
          <table:table-cell table:style-name="ce21" office:value-type="float" office:value="57" calcext:value-type="float">
            <text:p>57</text:p>
          </table:table-cell>
          <table:table-cell table:style-name="ce11" office:value-type="string" calcext:value-type="string">
            <text:p>エイジング</text:p>
          </table:table-cell>
          <table:table-cell table:style-name="ce11" table:formula="of:=[.E97]" office:value-type="string" office:string-value="エイジング" calcext:value-type="string">
            <text:p>エイジング</text:p>
          </table:table-cell>
          <table:table-cell table:style-name="ce11" office:value-type="string" calcext:value-type="string">
            <text:p>えいじんぐ</text:p>
          </table:table-cell>
          <table:table-cell table:style-name="ce11" office:value-type="string" calcext:value-type="string">
            <text:p>第１弾ブースターパック</text:p>
          </table:table-cell>
          <table:table-cell table:style-name="ce11" table:formula="of:=VLOOKUP([.H97];[$収録番号.$A$1:$収録番号.$B$10];2;0)" office:value-type="float" office:value="15" calcext:value-type="float">
            <text:p>15</text:p>
          </table:table-cell>
          <table:table-cell table:style-name="ce11" office:value-type="string" calcext:value-type="string">
            <text:p>R</text:p>
          </table:table-cell>
          <table:table-cell table:style-name="ce11" table:formula="of:=VLOOKUP([.J97];[$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97];[$種類番号.$A$1:$種類番号.$B$4];2;0)" office:value-type="float" office:value="3" calcext:value-type="float">
            <text:p>3</text:p>
          </table:table-cell>
          <table:table-cell table:style-name="ce11" office:value-type="string" calcext:value-type="string">
            <text:p>緑</text:p>
          </table:table-cell>
          <table:table-cell table:style-name="ce11" table:formula="of:=VLOOKUP([.N97];[$色番号.$A$1:$色番号.$B$10];2;0)" office:value-type="float" office:value="4" calcext:value-type="float">
            <text:p>4</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9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97];[$特性番号.$A$1:$特性番号.$B$8];2;0);0)" office:value-type="float" office:value="0" calcext:value-type="float">
            <text:p>0</text:p>
          </table:table-cell>
          <table:table-cell table:style-name="ce11" office:value-type="string" calcext:value-type="string">
            <text:p>相手の戦場のイジン1体を指定して発動できる。そのイジンを裏にして魔力ゾーン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97];[$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7.png</text:p>
          </table:table-cell>
          <table:table-cell table:style-name="ce11" table:formula="of:=CONCATENATE([$JSON.$A$1];[.$C97];[$JSON.$B$1];[.$E97];[$JSON.$C$1];[.F97];[$JSON.$D$1];[.$G97];[$JSON.$E$1];IF(ISNA([.$T97]);&quot;null&quot;;&quot;&quot;&quot;&quot;&amp;[.$T97]&amp;&quot;&quot;&quot;&quot;);[$JSON.$F$1];[.$V97];[$JSON.$G$1];IF(ISNA([.$X97]);&quot;null&quot;;&quot;&quot;&quot;&quot;&amp;[.$X97]&amp;&quot;&quot;&quot;&quot;);[$JSON.$H$1];[.$AA97];[$JSON.$I$1];[.$I97];[$JSON.$J$1];[.K97];[$JSON.$K$1];[.$M97];[$JSON.$L$1];[.$P97];[$JSON.$M$1];[.$O97];[$JSON.$N$1];[.$S97];[$JSON.$O$1];[.$U97];[$JSON.$P$1];IF(ISNA([.$W97]);&quot;null&quot;;[.$W97]);[$JSON.$Q$1];[.$Y97];[$JSON.$R$1];IF([.$Z97];&quot;true&quot;;&quot;false&quot;);[$JSON.$S$1];[.$A97];[$JSON.$T$1];[.$B97];[$JSON.$U$1])" office:value-type="string" office:string-value="{&quot;id&quot;:&quot;1-57&quot;,&quot;name&quot;:&quot;エイジング&quot;,&quot;displayName&quot;:&quot;エイジング&quot;,&quot;kana&quot;:&quot;えいじんぐ&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rarity&quot;:2,&quot;type&quot;:3,&quot;level&quot;:4,&quot;color&quot;:4,&quot;term&quot;:0,&quot;trait&quot;:0,&quot;power&quot;:null,&quot;legacy&quot;:2,&quot;anyNumCopies&quot;:false,&quot;orderTable&quot;:96,&quot;orderDeck&quot;:407}," calcext:value-type="string">
            <text:p>{"id":"1-57","name":"エイジング","displayName":"エイジング","kana":"えいじんぐ","traitText":null,"ruleText":"相手の戦場のイジン1体を指定して発動できる。そのイジンを裏にして魔力ゾーンに置く。","legacyText":"冥府発動","imageUrl":"https://one-draw.jp/ijinden/cardlist/001/card/01_057.png","expansion":15,"rarity":2,"type":3,"level":4,"color":4,"term":0,"trait":0,"power":null,"legacy":2,"anyNumCopies":false,"orderTable":96,"orderDeck":407},</text:p>
          </table:table-cell>
          <table:table-cell table:number-columns-repeated="16356"/>
        </table:table-row>
        <table:table-row table:style-name="ro2">
          <table:table-cell table:style-name="ce11" office:value-type="float" office:value="97" calcext:value-type="float">
            <text:p>97</text:p>
          </table:table-cell>
          <table:table-cell table:style-name="ce11" office:value-type="float" office:value="436" calcext:value-type="float">
            <text:p>436</text:p>
          </table:table-cell>
          <table:table-cell table:style-name="ce21" office:value-type="string" calcext:value-type="string">
            <text:p>1-58</text:p>
          </table:table-cell>
          <table:table-cell table:style-name="ce21" office:value-type="float" office:value="58" calcext:value-type="float">
            <text:p>58</text:p>
          </table:table-cell>
          <table:table-cell table:style-name="ce11" office:value-type="string" calcext:value-type="string">
            <text:p>カンテラ</text:p>
          </table:table-cell>
          <table:table-cell table:style-name="ce11" table:formula="of:=[.E98]" office:value-type="string" office:string-value="カンテラ" calcext:value-type="string">
            <text:p>カンテラ</text:p>
          </table:table-cell>
          <table:table-cell table:style-name="ce11" office:value-type="string" calcext:value-type="string">
            <text:p>かんてら</text:p>
          </table:table-cell>
          <table:table-cell table:style-name="ce11" office:value-type="string" calcext:value-type="string">
            <text:p>第１弾ブースターパック</text:p>
          </table:table-cell>
          <table:table-cell table:style-name="ce11" table:formula="of:=VLOOKUP([.H98];[$収録番号.$A$1:$収録番号.$B$10];2;0)" office:value-type="float" office:value="15" calcext:value-type="float">
            <text:p>15</text:p>
          </table:table-cell>
          <table:table-cell table:style-name="ce11" office:value-type="string" calcext:value-type="string">
            <text:p>N</text:p>
          </table:table-cell>
          <table:table-cell table:style-name="ce11" table:formula="of:=VLOOKUP([.J9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98];[$種類番号.$A$1:$種類番号.$B$4];2;0)" office:value-type="float" office:value="4" calcext:value-type="float">
            <text:p>4</text:p>
          </table:table-cell>
          <table:table-cell table:style-name="ce11" office:value-type="string" calcext:value-type="string">
            <text:p>赤</text:p>
          </table:table-cell>
          <table:table-cell table:style-name="ce11" table:formula="of:=VLOOKUP([.N98];[$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98];[$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8.png</text:p>
          </table:table-cell>
          <table:table-cell table:style-name="ce11" table:formula="of:=CONCATENATE([$JSON.$A$1];[.$C98];[$JSON.$B$1];[.$E98];[$JSON.$C$1];[.F98];[$JSON.$D$1];[.$G98];[$JSON.$E$1];IF(ISNA([.$T98]);&quot;null&quot;;&quot;&quot;&quot;&quot;&amp;[.$T98]&amp;&quot;&quot;&quot;&quot;);[$JSON.$F$1];[.$V98];[$JSON.$G$1];IF(ISNA([.$X98]);&quot;null&quot;;&quot;&quot;&quot;&quot;&amp;[.$X98]&amp;&quot;&quot;&quot;&quot;);[$JSON.$H$1];[.$AA98];[$JSON.$I$1];[.$I98];[$JSON.$J$1];[.K98];[$JSON.$K$1];[.$M98];[$JSON.$L$1];[.$P98];[$JSON.$M$1];[.$O98];[$JSON.$N$1];[.$S98];[$JSON.$O$1];[.$U98];[$JSON.$P$1];IF(ISNA([.$W98]);&quot;null&quot;;[.$W98]);[$JSON.$Q$1];[.$Y98];[$JSON.$R$1];IF([.$Z98];&quot;true&quot;;&quot;false&quot;);[$JSON.$S$1];[.$A98];[$JSON.$T$1];[.$B98];[$JSON.$U$1])" office:value-type="string" office:string-value="{&quot;id&quot;:&quot;1-58&quot;,&quot;name&quot;:&quot;カンテラ&quot;,&quot;displayName&quot;:&quot;カンテラ&quot;,&quot;kana&quot;:&quot;かんてら&quot;,&quot;traitText&quot;:null,&quot;ruleText&quot;:&quot;魔力ゾーンに置かれたとき、1ドローする。&quot;,&quot;legacyText&quot;:null,&quot;imageUrl&quot;:&quot;https://one-draw.jp/ijinden/cardlist/001/card/01_058.png&quot;,&quot;expansion&quot;:15,&quot;rarity&quot;:1,&quot;type&quot;:4,&quot;level&quot;:1,&quot;color&quot;:1,&quot;term&quot;:0,&quot;trait&quot;:0,&quot;power&quot;:null,&quot;legacy&quot;:0,&quot;anyNumCopies&quot;:false,&quot;orderTable&quot;:97,&quot;orderDeck&quot;:436}," calcext:value-type="string">
            <text:p>{"id":"1-58","name":"カンテラ","displayName":"カンテラ","kana":"かんてら","traitText":null,"ruleText":"魔力ゾーンに置かれたとき、1ドローする。","legacyText":null,"imageUrl":"https://one-draw.jp/ijinden/cardlist/001/card/01_058.png","expansion":15,"rarity":1,"type":4,"level":1,"color":1,"term":0,"trait":0,"power":null,"legacy":0,"anyNumCopies":false,"orderTable":97,"orderDeck":436},</text:p>
          </table:table-cell>
          <table:table-cell table:number-columns-repeated="16356"/>
        </table:table-row>
        <table:table-row table:style-name="ro2">
          <table:table-cell table:style-name="ce11" office:value-type="float" office:value="98" calcext:value-type="float">
            <text:p>98</text:p>
          </table:table-cell>
          <table:table-cell table:style-name="ce11" office:value-type="float" office:value="437" calcext:value-type="float">
            <text:p>437</text:p>
          </table:table-cell>
          <table:table-cell table:style-name="ce21" office:value-type="string" calcext:value-type="string">
            <text:p>1-59</text:p>
          </table:table-cell>
          <table:table-cell table:style-name="ce21" office:value-type="float" office:value="59" calcext:value-type="float">
            <text:p>59</text:p>
          </table:table-cell>
          <table:table-cell table:style-name="ce11" office:value-type="string" calcext:value-type="string">
            <text:p>ファイアソード</text:p>
          </table:table-cell>
          <table:table-cell table:style-name="ce11" table:formula="of:=[.E99]" office:value-type="string" office:string-value="ファイアソード" calcext:value-type="string">
            <text:p>ファイアソード</text:p>
          </table:table-cell>
          <table:table-cell table:style-name="ce11" office:value-type="string" calcext:value-type="string">
            <text:p>ふぁいあそーど</text:p>
          </table:table-cell>
          <table:table-cell table:style-name="ce11" office:value-type="string" calcext:value-type="string">
            <text:p>第１弾ブースターパック</text:p>
          </table:table-cell>
          <table:table-cell table:style-name="ce11" table:formula="of:=VLOOKUP([.H99];[$収録番号.$A$1:$収録番号.$B$10];2;0)" office:value-type="float" office:value="15" calcext:value-type="float">
            <text:p>15</text:p>
          </table:table-cell>
          <table:table-cell table:style-name="ce11" office:value-type="string" calcext:value-type="string">
            <text:p>N</text:p>
          </table:table-cell>
          <table:table-cell table:style-name="ce11" table:formula="of:=VLOOKUP([.J9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99];[$種類番号.$A$1:$種類番号.$B$4];2;0)" office:value-type="float" office:value="4" calcext:value-type="float">
            <text:p>4</text:p>
          </table:table-cell>
          <table:table-cell table:style-name="ce11" office:value-type="string" calcext:value-type="string">
            <text:p>赤</text:p>
          </table:table-cell>
          <table:table-cell table:style-name="ce11" table:formula="of:=VLOOKUP([.N99];[$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9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99];[$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アタック+2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9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59.png</text:p>
          </table:table-cell>
          <table:table-cell table:style-name="ce11" table:formula="of:=CONCATENATE([$JSON.$A$1];[.$C99];[$JSON.$B$1];[.$E99];[$JSON.$C$1];[.F99];[$JSON.$D$1];[.$G99];[$JSON.$E$1];IF(ISNA([.$T99]);&quot;null&quot;;&quot;&quot;&quot;&quot;&amp;[.$T99]&amp;&quot;&quot;&quot;&quot;);[$JSON.$F$1];[.$V99];[$JSON.$G$1];IF(ISNA([.$X99]);&quot;null&quot;;&quot;&quot;&quot;&quot;&amp;[.$X99]&amp;&quot;&quot;&quot;&quot;);[$JSON.$H$1];[.$AA99];[$JSON.$I$1];[.$I99];[$JSON.$J$1];[.K99];[$JSON.$K$1];[.$M99];[$JSON.$L$1];[.$P99];[$JSON.$M$1];[.$O99];[$JSON.$N$1];[.$S99];[$JSON.$O$1];[.$U99];[$JSON.$P$1];IF(ISNA([.$W99]);&quot;null&quot;;[.$W99]);[$JSON.$Q$1];[.$Y99];[$JSON.$R$1];IF([.$Z99];&quot;true&quot;;&quot;false&quot;);[$JSON.$S$1];[.$A99];[$JSON.$T$1];[.$B99];[$JSON.$U$1])" office:value-type="string" office:string-value="{&quot;id&quot;:&quot;1-59&quot;,&quot;name&quot;:&quot;ファイアソード&quot;,&quot;displayName&quot;:&quot;ファイアソード&quot;,&quot;kana&quot;:&quot;ふぁいあそーど&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rarity&quot;:1,&quot;type&quot;:4,&quot;level&quot;:1,&quot;color&quot;:1,&quot;term&quot;:0,&quot;trait&quot;:0,&quot;power&quot;:null,&quot;legacy&quot;:0,&quot;anyNumCopies&quot;:false,&quot;orderTable&quot;:98,&quot;orderDeck&quot;:437}," calcext:value-type="string">
            <text:p>{"id":"1-59","name":"ファイアソード","displayName":"ファイアソード","kana":"ふぁいあそーど","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rarity":1,"type":4,"level":1,"color":1,"term":0,"trait":0,"power":null,"legacy":0,"anyNumCopies":false,"orderTable":98,"orderDeck":437},</text:p>
          </table:table-cell>
          <table:table-cell table:number-columns-repeated="16356"/>
        </table:table-row>
        <table:table-row table:style-name="ro2">
          <table:table-cell table:style-name="ce11" office:value-type="float" office:value="99" calcext:value-type="float">
            <text:p>99</text:p>
          </table:table-cell>
          <table:table-cell table:style-name="ce11" office:value-type="float" office:value="438" calcext:value-type="float">
            <text:p>438</text:p>
          </table:table-cell>
          <table:table-cell table:style-name="ce21" office:value-type="string" calcext:value-type="string">
            <text:p>1-60</text:p>
          </table:table-cell>
          <table:table-cell table:style-name="ce21" office:value-type="float" office:value="60" calcext:value-type="float">
            <text:p>60</text:p>
          </table:table-cell>
          <table:table-cell table:style-name="ce11" office:value-type="string" calcext:value-type="string">
            <text:p>髭切</text:p>
          </table:table-cell>
          <table:table-cell table:style-name="ce11" table:formula="of:=[.E100]" office:value-type="string" office:string-value="髭切" calcext:value-type="string">
            <text:p>髭切</text:p>
          </table:table-cell>
          <table:table-cell table:style-name="ce11" office:value-type="string" calcext:value-type="string">
            <text:p>ひげきり</text:p>
          </table:table-cell>
          <table:table-cell table:style-name="ce11" office:value-type="string" calcext:value-type="string">
            <text:p>第１弾ブースターパック</text:p>
          </table:table-cell>
          <table:table-cell table:style-name="ce11" table:formula="of:=VLOOKUP([.H100];[$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0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0];[$種類番号.$A$1:$種類番号.$B$4];2;0)" office:value-type="float" office:value="4" calcext:value-type="float">
            <text:p>4</text:p>
          </table:table-cell>
          <table:table-cell table:style-name="ce11" office:value-type="string" calcext:value-type="string">
            <text:p>赤</text:p>
          </table:table-cell>
          <table:table-cell table:style-name="ce11" table:formula="of:=VLOOKUP([.N100];[$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00];[$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0];[$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0.png</text:p>
          </table:table-cell>
          <table:table-cell table:style-name="ce11" table:formula="of:=CONCATENATE([$JSON.$A$1];[.$C100];[$JSON.$B$1];[.$E100];[$JSON.$C$1];[.F100];[$JSON.$D$1];[.$G100];[$JSON.$E$1];IF(ISNA([.$T100]);&quot;null&quot;;&quot;&quot;&quot;&quot;&amp;[.$T100]&amp;&quot;&quot;&quot;&quot;);[$JSON.$F$1];[.$V100];[$JSON.$G$1];IF(ISNA([.$X100]);&quot;null&quot;;&quot;&quot;&quot;&quot;&amp;[.$X100]&amp;&quot;&quot;&quot;&quot;);[$JSON.$H$1];[.$AA100];[$JSON.$I$1];[.$I100];[$JSON.$J$1];[.K100];[$JSON.$K$1];[.$M100];[$JSON.$L$1];[.$P100];[$JSON.$M$1];[.$O100];[$JSON.$N$1];[.$S100];[$JSON.$O$1];[.$U100];[$JSON.$P$1];IF(ISNA([.$W100]);&quot;null&quot;;[.$W100]);[$JSON.$Q$1];[.$Y100];[$JSON.$R$1];IF([.$Z100];&quot;true&quot;;&quot;false&quot;);[$JSON.$S$1];[.$A100];[$JSON.$T$1];[.$B100];[$JSON.$U$1])" office:value-type="string" office:string-value="{&quot;id&quot;:&quot;1-60&quot;,&quot;name&quot;:&quot;髭切&quot;,&quot;displayName&quot;:&quot;髭切&quot;,&quot;kana&quot;:&quot;ひげきり&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rarity&quot;:1,&quot;type&quot;:4,&quot;level&quot;:1,&quot;color&quot;:1,&quot;term&quot;:0,&quot;trait&quot;:0,&quot;power&quot;:null,&quot;legacy&quot;:3,&quot;anyNumCopies&quot;:false,&quot;orderTable&quot;:99,&quot;orderDeck&quot;:438}," calcext:value-type="string">
            <text:p>{"id":"1-60","name":"髭切","displayName":"髭切","kana":"ひげきり","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rarity":1,"type":4,"level":1,"color":1,"term":0,"trait":0,"power":null,"legacy":3,"anyNumCopies":false,"orderTable":99,"orderDeck":438},</text:p>
          </table:table-cell>
          <table:table-cell table:number-columns-repeated="16356"/>
        </table:table-row>
        <table:table-row table:style-name="ro2">
          <table:table-cell table:style-name="ce11" office:value-type="float" office:value="100" calcext:value-type="float">
            <text:p>100</text:p>
          </table:table-cell>
          <table:table-cell table:style-name="ce11" office:value-type="float" office:value="478" calcext:value-type="float">
            <text:p>478</text:p>
          </table:table-cell>
          <table:table-cell table:style-name="ce21" office:value-type="string" calcext:value-type="string">
            <text:p>1-61</text:p>
          </table:table-cell>
          <table:table-cell table:style-name="ce21" office:value-type="float" office:value="61" calcext:value-type="float">
            <text:p>61</text:p>
          </table:table-cell>
          <table:table-cell table:style-name="ce11" office:value-type="string" calcext:value-type="string">
            <text:p>レッドオーブ</text:p>
          </table:table-cell>
          <table:table-cell table:style-name="ce11" office:value-type="string" calcext:value-type="string">
            <text:p>レッドオーブ (第1弾)</text:p>
          </table:table-cell>
          <table:table-cell table:style-name="ce11" office:value-type="string" calcext:value-type="string">
            <text:p>れっどおーぶ</text:p>
          </table:table-cell>
          <table:table-cell table:style-name="ce11" office:value-type="string" calcext:value-type="string">
            <text:p>第１弾ブースターパック</text:p>
          </table:table-cell>
          <table:table-cell table:style-name="ce11" table:formula="of:=VLOOKUP([.H101];[$収録番号.$A$1:$収録番号.$B$10];2;0)" office:value-type="float" office:value="15" calcext:value-type="float">
            <text:p>15</text:p>
          </table:table-cell>
          <table:table-cell table:style-name="ce11" office:value-type="string" calcext:value-type="string">
            <text:p>R</text:p>
          </table:table-cell>
          <table:table-cell table:style-name="ce11" table:formula="of:=VLOOKUP([.J101];[$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1];[$種類番号.$A$1:$種類番号.$B$4];2;0)" office:value-type="float" office:value="4" calcext:value-type="float">
            <text:p>4</text:p>
          </table:table-cell>
          <table:table-cell table:style-name="ce11" office:value-type="string" calcext:value-type="string">
            <text:p>赤</text:p>
          </table:table-cell>
          <table:table-cell table:style-name="ce11" table:formula="of:=VLOOKUP([.N101];[$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01];[$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1];[$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1.png</text:p>
          </table:table-cell>
          <table:table-cell table:style-name="ce11" table:formula="of:=CONCATENATE([$JSON.$A$1];[.$C101];[$JSON.$B$1];[.$E101];[$JSON.$C$1];[.F101];[$JSON.$D$1];[.$G101];[$JSON.$E$1];IF(ISNA([.$T101]);&quot;null&quot;;&quot;&quot;&quot;&quot;&amp;[.$T101]&amp;&quot;&quot;&quot;&quot;);[$JSON.$F$1];[.$V101];[$JSON.$G$1];IF(ISNA([.$X101]);&quot;null&quot;;&quot;&quot;&quot;&quot;&amp;[.$X101]&amp;&quot;&quot;&quot;&quot;);[$JSON.$H$1];[.$AA101];[$JSON.$I$1];[.$I101];[$JSON.$J$1];[.K101];[$JSON.$K$1];[.$M101];[$JSON.$L$1];[.$P101];[$JSON.$M$1];[.$O101];[$JSON.$N$1];[.$S101];[$JSON.$O$1];[.$U101];[$JSON.$P$1];IF(ISNA([.$W101]);&quot;null&quot;;[.$W101]);[$JSON.$Q$1];[.$Y101];[$JSON.$R$1];IF([.$Z101];&quot;true&quot;;&quot;false&quot;);[$JSON.$S$1];[.$A101];[$JSON.$T$1];[.$B101];[$JSON.$U$1])" office:value-type="string" office:string-value="{&quot;id&quot;:&quot;1-61&quot;,&quot;name&quot;:&quot;レッドオーブ&quot;,&quot;displayName&quot;:&quot;レッドオーブ (第1弾)&quot;,&quot;kana&quot;:&quot;れっどおーぶ&quot;,&quot;traitText&quot;:null,&quot;ruleText&quot;:&quot;&quot;,&quot;legacyText&quot;:&quot;復元&quot;,&quot;imageUrl&quot;:&quot;https://one-draw.jp/ijinden/cardlist/001/card/01_061.png&quot;,&quot;expansion&quot;:15,&quot;rarity&quot;:2,&quot;type&quot;:4,&quot;level&quot;:2,&quot;color&quot;:1,&quot;term&quot;:0,&quot;trait&quot;:0,&quot;power&quot;:null,&quot;legacy&quot;:3,&quot;anyNumCopies&quot;:false,&quot;orderTable&quot;:100,&quot;orderDeck&quot;:478}," calcext:value-type="string">
            <text:p>{"id":"1-61","name":"レッドオーブ","displayName":"レッドオーブ (第1弾)","kana":"れっどおーぶ","traitText":null,"ruleText":"","legacyText":"復元","imageUrl":"https://one-draw.jp/ijinden/cardlist/001/card/01_061.png","expansion":15,"rarity":2,"type":4,"level":2,"color":1,"term":0,"trait":0,"power":null,"legacy":3,"anyNumCopies":false,"orderTable":100,"orderDeck":478},</text:p>
          </table:table-cell>
          <table:table-cell table:number-columns-repeated="16356"/>
        </table:table-row>
        <table:table-row table:style-name="ro2">
          <table:table-cell table:style-name="ce11" office:value-type="float" office:value="101" calcext:value-type="float">
            <text:p>101</text:p>
          </table:table-cell>
          <table:table-cell table:style-name="ce11" office:value-type="float" office:value="443" calcext:value-type="float">
            <text:p>443</text:p>
          </table:table-cell>
          <table:table-cell table:style-name="ce21" office:value-type="string" calcext:value-type="string">
            <text:p>1-62</text:p>
          </table:table-cell>
          <table:table-cell table:style-name="ce21" office:value-type="float" office:value="62" calcext:value-type="float">
            <text:p>62</text:p>
          </table:table-cell>
          <table:table-cell table:style-name="ce11" office:value-type="string" calcext:value-type="string">
            <text:p>ウォーターポット</text:p>
          </table:table-cell>
          <table:table-cell table:style-name="ce11" table:formula="of:=[.E102]" office:value-type="string" office:string-value="ウォーターポット" calcext:value-type="string">
            <text:p>ウォーターポット</text:p>
          </table:table-cell>
          <table:table-cell table:style-name="ce11" office:value-type="string" calcext:value-type="string">
            <text:p>うぉーたーぽっと</text:p>
          </table:table-cell>
          <table:table-cell table:style-name="ce11" office:value-type="string" calcext:value-type="string">
            <text:p>第１弾ブースターパック</text:p>
          </table:table-cell>
          <table:table-cell table:style-name="ce11" table:formula="of:=VLOOKUP([.H102];[$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0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2];[$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2];[$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02];[$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2.png</text:p>
          </table:table-cell>
          <table:table-cell table:style-name="ce11" table:formula="of:=CONCATENATE([$JSON.$A$1];[.$C102];[$JSON.$B$1];[.$E102];[$JSON.$C$1];[.F102];[$JSON.$D$1];[.$G102];[$JSON.$E$1];IF(ISNA([.$T102]);&quot;null&quot;;&quot;&quot;&quot;&quot;&amp;[.$T102]&amp;&quot;&quot;&quot;&quot;);[$JSON.$F$1];[.$V102];[$JSON.$G$1];IF(ISNA([.$X102]);&quot;null&quot;;&quot;&quot;&quot;&quot;&amp;[.$X102]&amp;&quot;&quot;&quot;&quot;);[$JSON.$H$1];[.$AA102];[$JSON.$I$1];[.$I102];[$JSON.$J$1];[.K102];[$JSON.$K$1];[.$M102];[$JSON.$L$1];[.$P102];[$JSON.$M$1];[.$O102];[$JSON.$N$1];[.$S102];[$JSON.$O$1];[.$U102];[$JSON.$P$1];IF(ISNA([.$W102]);&quot;null&quot;;[.$W102]);[$JSON.$Q$1];[.$Y102];[$JSON.$R$1];IF([.$Z102];&quot;true&quot;;&quot;false&quot;);[$JSON.$S$1];[.$A102];[$JSON.$T$1];[.$B102];[$JSON.$U$1])" office:value-type="string" office:string-value="{&quot;id&quot;:&quot;1-62&quot;,&quot;name&quot;:&quot;ウォーターポット&quot;,&quot;displayName&quot;:&quot;ウォーターポット&quot;,&quot;kana&quot;:&quot;うぉーたーぽっと&quot;,&quot;traitText&quot;:null,&quot;ruleText&quot;:&quot;魔力ゾーンに置かれたとき、1ドローする。&quot;,&quot;legacyText&quot;:null,&quot;imageUrl&quot;:&quot;https://one-draw.jp/ijinden/cardlist/001/card/01_062.png&quot;,&quot;expansion&quot;:15,&quot;rarity&quot;:1,&quot;type&quot;:4,&quot;level&quot;:1,&quot;color&quot;:2,&quot;term&quot;:0,&quot;trait&quot;:0,&quot;power&quot;:null,&quot;legacy&quot;:0,&quot;anyNumCopies&quot;:false,&quot;orderTable&quot;:101,&quot;orderDeck&quot;:443}," calcext:value-type="string">
            <text:p>{"id":"1-62","name":"ウォーターポット","displayName":"ウォーターポット","kana":"うぉーたーぽっと","traitText":null,"ruleText":"魔力ゾーンに置かれたとき、1ドローする。","legacyText":null,"imageUrl":"https://one-draw.jp/ijinden/cardlist/001/card/01_062.png","expansion":15,"rarity":1,"type":4,"level":1,"color":2,"term":0,"trait":0,"power":null,"legacy":0,"anyNumCopies":false,"orderTable":101,"orderDeck":443},</text:p>
          </table:table-cell>
          <table:table-cell table:number-columns-repeated="16356"/>
        </table:table-row>
        <table:table-row table:style-name="ro2">
          <table:table-cell table:style-name="ce11" office:value-type="float" office:value="102" calcext:value-type="float">
            <text:p>102</text:p>
          </table:table-cell>
          <table:table-cell table:style-name="ce11" office:value-type="float" office:value="444" calcext:value-type="float">
            <text:p>444</text:p>
          </table:table-cell>
          <table:table-cell table:style-name="ce21" office:value-type="string" calcext:value-type="string">
            <text:p>1-63</text:p>
          </table:table-cell>
          <table:table-cell table:style-name="ce21" office:value-type="float" office:value="63" calcext:value-type="float">
            <text:p>63</text:p>
          </table:table-cell>
          <table:table-cell table:style-name="ce11" office:value-type="string" calcext:value-type="string">
            <text:p>アイスソード</text:p>
          </table:table-cell>
          <table:table-cell table:style-name="ce11" table:formula="of:=[.E103]" office:value-type="string" office:string-value="アイスソード" calcext:value-type="string">
            <text:p>アイスソード</text:p>
          </table:table-cell>
          <table:table-cell table:style-name="ce11" office:value-type="string" calcext:value-type="string">
            <text:p>あいすそーど</text:p>
          </table:table-cell>
          <table:table-cell table:style-name="ce11" office:value-type="string" calcext:value-type="string">
            <text:p>第１弾ブースターパック</text:p>
          </table:table-cell>
          <table:table-cell table:style-name="ce11" table:formula="of:=VLOOKUP([.H103];[$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0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3];[$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3];[$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03];[$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ブロック+2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3.png</text:p>
          </table:table-cell>
          <table:table-cell table:style-name="ce11" table:formula="of:=CONCATENATE([$JSON.$A$1];[.$C103];[$JSON.$B$1];[.$E103];[$JSON.$C$1];[.F103];[$JSON.$D$1];[.$G103];[$JSON.$E$1];IF(ISNA([.$T103]);&quot;null&quot;;&quot;&quot;&quot;&quot;&amp;[.$T103]&amp;&quot;&quot;&quot;&quot;);[$JSON.$F$1];[.$V103];[$JSON.$G$1];IF(ISNA([.$X103]);&quot;null&quot;;&quot;&quot;&quot;&quot;&amp;[.$X103]&amp;&quot;&quot;&quot;&quot;);[$JSON.$H$1];[.$AA103];[$JSON.$I$1];[.$I103];[$JSON.$J$1];[.K103];[$JSON.$K$1];[.$M103];[$JSON.$L$1];[.$P103];[$JSON.$M$1];[.$O103];[$JSON.$N$1];[.$S103];[$JSON.$O$1];[.$U103];[$JSON.$P$1];IF(ISNA([.$W103]);&quot;null&quot;;[.$W103]);[$JSON.$Q$1];[.$Y103];[$JSON.$R$1];IF([.$Z103];&quot;true&quot;;&quot;false&quot;);[$JSON.$S$1];[.$A103];[$JSON.$T$1];[.$B103];[$JSON.$U$1])" office:value-type="string" office:string-value="{&quot;id&quot;:&quot;1-63&quot;,&quot;name&quot;:&quot;アイスソード&quot;,&quot;displayName&quot;:&quot;アイスソード&quot;,&quot;kana&quot;:&quot;あいすそーど&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rarity&quot;:1,&quot;type&quot;:4,&quot;level&quot;:1,&quot;color&quot;:2,&quot;term&quot;:0,&quot;trait&quot;:0,&quot;power&quot;:null,&quot;legacy&quot;:0,&quot;anyNumCopies&quot;:false,&quot;orderTable&quot;:102,&quot;orderDeck&quot;:444}," calcext:value-type="string">
            <text:p>{"id":"1-63","name":"アイスソード","displayName":"アイスソード","kana":"あいすそーど","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rarity":1,"type":4,"level":1,"color":2,"term":0,"trait":0,"power":null,"legacy":0,"anyNumCopies":false,"orderTable":102,"orderDeck":444},</text:p>
          </table:table-cell>
          <table:table-cell table:number-columns-repeated="16356"/>
        </table:table-row>
        <table:table-row table:style-name="ro2">
          <table:table-cell table:style-name="ce11" office:value-type="float" office:value="103" calcext:value-type="float">
            <text:p>103</text:p>
          </table:table-cell>
          <table:table-cell table:style-name="ce11" office:value-type="float" office:value="445" calcext:value-type="float">
            <text:p>445</text:p>
          </table:table-cell>
          <table:table-cell table:style-name="ce21" office:value-type="string" calcext:value-type="string">
            <text:p>1-64</text:p>
          </table:table-cell>
          <table:table-cell table:style-name="ce21" office:value-type="float" office:value="64" calcext:value-type="float">
            <text:p>64</text:p>
          </table:table-cell>
          <table:table-cell table:style-name="ce11" office:value-type="string" calcext:value-type="string">
            <text:p>羅針盤</text:p>
          </table:table-cell>
          <table:table-cell table:style-name="ce11" table:formula="of:=[.E104]" office:value-type="string" office:string-value="羅針盤" calcext:value-type="string">
            <text:p>羅針盤</text:p>
          </table:table-cell>
          <table:table-cell table:style-name="ce11" office:value-type="string" calcext:value-type="string">
            <text:p>らしんばん</text:p>
          </table:table-cell>
          <table:table-cell table:style-name="ce11" office:value-type="string" calcext:value-type="string">
            <text:p>第１弾ブースターパック</text:p>
          </table:table-cell>
          <table:table-cell table:style-name="ce11" table:formula="of:=VLOOKUP([.H104];[$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0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4];[$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4];[$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04];[$特性番号.$A$1:$特性番号.$B$8];2;0);0)" office:value-type="float" office:value="0" calcext:value-type="float">
            <text:p>0</text:p>
          </table:table-cell>
          <table:table-cell table:style-name="ce11"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4];[$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4.png</text:p>
          </table:table-cell>
          <table:table-cell table:style-name="ce11" table:formula="of:=CONCATENATE([$JSON.$A$1];[.$C104];[$JSON.$B$1];[.$E104];[$JSON.$C$1];[.F104];[$JSON.$D$1];[.$G104];[$JSON.$E$1];IF(ISNA([.$T104]);&quot;null&quot;;&quot;&quot;&quot;&quot;&amp;[.$T104]&amp;&quot;&quot;&quot;&quot;);[$JSON.$F$1];[.$V104];[$JSON.$G$1];IF(ISNA([.$X104]);&quot;null&quot;;&quot;&quot;&quot;&quot;&amp;[.$X104]&amp;&quot;&quot;&quot;&quot;);[$JSON.$H$1];[.$AA104];[$JSON.$I$1];[.$I104];[$JSON.$J$1];[.K104];[$JSON.$K$1];[.$M104];[$JSON.$L$1];[.$P104];[$JSON.$M$1];[.$O104];[$JSON.$N$1];[.$S104];[$JSON.$O$1];[.$U104];[$JSON.$P$1];IF(ISNA([.$W104]);&quot;null&quot;;[.$W104]);[$JSON.$Q$1];[.$Y104];[$JSON.$R$1];IF([.$Z104];&quot;true&quot;;&quot;false&quot;);[$JSON.$S$1];[.$A104];[$JSON.$T$1];[.$B104];[$JSON.$U$1])" office:value-type="string" office:string-value="{&quot;id&quot;:&quot;1-64&quot;,&quot;name&quot;:&quot;羅針盤&quot;,&quot;displayName&quot;:&quot;羅針盤&quot;,&quot;kana&quot;:&quot;らしんばん&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rarity&quot;:1,&quot;type&quot;:4,&quot;level&quot;:1,&quot;color&quot;:2,&quot;term&quot;:0,&quot;trait&quot;:0,&quot;power&quot;:null,&quot;legacy&quot;:3,&quot;anyNumCopies&quot;:false,&quot;orderTable&quot;:103,&quot;orderDeck&quot;:445}," calcext:value-type="string">
            <text:p>{"id":"1-64","name":"羅針盤","displayName":"羅針盤","kana":"らしんばん","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rarity":1,"type":4,"level":1,"color":2,"term":0,"trait":0,"power":null,"legacy":3,"anyNumCopies":false,"orderTable":103,"orderDeck":445},</text:p>
          </table:table-cell>
          <table:table-cell table:number-columns-repeated="16356"/>
        </table:table-row>
        <table:table-row table:style-name="ro2">
          <table:table-cell table:style-name="ce11" office:value-type="float" office:value="104" calcext:value-type="float">
            <text:p>104</text:p>
          </table:table-cell>
          <table:table-cell table:style-name="ce11" office:value-type="float" office:value="480" calcext:value-type="float">
            <text:p>480</text:p>
          </table:table-cell>
          <table:table-cell table:style-name="ce21" office:value-type="string" calcext:value-type="string">
            <text:p>1-65</text:p>
          </table:table-cell>
          <table:table-cell table:style-name="ce21" office:value-type="float" office:value="65" calcext:value-type="float">
            <text:p>65</text:p>
          </table:table-cell>
          <table:table-cell table:style-name="ce11" office:value-type="string" calcext:value-type="string">
            <text:p>ブルーオーブ</text:p>
          </table:table-cell>
          <table:table-cell table:style-name="ce11" office:value-type="string" calcext:value-type="string">
            <text:p>ブルーオーブ (第1弾)</text:p>
          </table:table-cell>
          <table:table-cell table:style-name="ce11" office:value-type="string" calcext:value-type="string">
            <text:p>ぶるーおーぶ</text:p>
          </table:table-cell>
          <table:table-cell table:style-name="ce11" office:value-type="string" calcext:value-type="string">
            <text:p>第１弾ブースターパック</text:p>
          </table:table-cell>
          <table:table-cell table:style-name="ce11" table:formula="of:=VLOOKUP([.H105];[$収録番号.$A$1:$収録番号.$B$10];2;0)" office:value-type="float" office:value="15" calcext:value-type="float">
            <text:p>15</text:p>
          </table:table-cell>
          <table:table-cell table:style-name="ce11" office:value-type="string" calcext:value-type="string">
            <text:p>R</text:p>
          </table:table-cell>
          <table:table-cell table:style-name="ce11" table:formula="of:=VLOOKUP([.J105];[$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5];[$種類番号.$A$1:$種類番号.$B$4];2;0)" office:value-type="float" office:value="4" calcext:value-type="float">
            <text:p>4</text:p>
          </table:table-cell>
          <table:table-cell table:style-name="ce11" office:value-type="string" calcext:value-type="string">
            <text:p>青</text:p>
          </table:table-cell>
          <table:table-cell table:style-name="ce11" table:formula="of:=VLOOKUP([.N105];[$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05];[$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5];[$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5.png</text:p>
          </table:table-cell>
          <table:table-cell table:style-name="ce11" table:formula="of:=CONCATENATE([$JSON.$A$1];[.$C105];[$JSON.$B$1];[.$E105];[$JSON.$C$1];[.F105];[$JSON.$D$1];[.$G105];[$JSON.$E$1];IF(ISNA([.$T105]);&quot;null&quot;;&quot;&quot;&quot;&quot;&amp;[.$T105]&amp;&quot;&quot;&quot;&quot;);[$JSON.$F$1];[.$V105];[$JSON.$G$1];IF(ISNA([.$X105]);&quot;null&quot;;&quot;&quot;&quot;&quot;&amp;[.$X105]&amp;&quot;&quot;&quot;&quot;);[$JSON.$H$1];[.$AA105];[$JSON.$I$1];[.$I105];[$JSON.$J$1];[.K105];[$JSON.$K$1];[.$M105];[$JSON.$L$1];[.$P105];[$JSON.$M$1];[.$O105];[$JSON.$N$1];[.$S105];[$JSON.$O$1];[.$U105];[$JSON.$P$1];IF(ISNA([.$W105]);&quot;null&quot;;[.$W105]);[$JSON.$Q$1];[.$Y105];[$JSON.$R$1];IF([.$Z105];&quot;true&quot;;&quot;false&quot;);[$JSON.$S$1];[.$A105];[$JSON.$T$1];[.$B105];[$JSON.$U$1])" office:value-type="string" office:string-value="{&quot;id&quot;:&quot;1-65&quot;,&quot;name&quot;:&quot;ブルーオーブ&quot;,&quot;displayName&quot;:&quot;ブルーオーブ (第1弾)&quot;,&quot;kana&quot;:&quot;ぶるーおーぶ&quot;,&quot;traitText&quot;:null,&quot;ruleText&quot;:&quot;&quot;,&quot;legacyText&quot;:&quot;復元&quot;,&quot;imageUrl&quot;:&quot;https://one-draw.jp/ijinden/cardlist/001/card/01_065.png&quot;,&quot;expansion&quot;:15,&quot;rarity&quot;:2,&quot;type&quot;:4,&quot;level&quot;:2,&quot;color&quot;:2,&quot;term&quot;:0,&quot;trait&quot;:0,&quot;power&quot;:null,&quot;legacy&quot;:3,&quot;anyNumCopies&quot;:false,&quot;orderTable&quot;:104,&quot;orderDeck&quot;:480}," calcext:value-type="string">
            <text:p>{"id":"1-65","name":"ブルーオーブ","displayName":"ブルーオーブ (第1弾)","kana":"ぶるーおーぶ","traitText":null,"ruleText":"","legacyText":"復元","imageUrl":"https://one-draw.jp/ijinden/cardlist/001/card/01_065.png","expansion":15,"rarity":2,"type":4,"level":2,"color":2,"term":0,"trait":0,"power":null,"legacy":3,"anyNumCopies":false,"orderTable":104,"orderDeck":480},</text:p>
          </table:table-cell>
          <table:table-cell table:number-columns-repeated="16356"/>
        </table:table-row>
        <table:table-row table:style-name="ro2">
          <table:table-cell table:style-name="ce11" office:value-type="float" office:value="105" calcext:value-type="float">
            <text:p>105</text:p>
          </table:table-cell>
          <table:table-cell table:style-name="ce11" office:value-type="float" office:value="450" calcext:value-type="float">
            <text:p>450</text:p>
          </table:table-cell>
          <table:table-cell table:style-name="ce21" office:value-type="string" calcext:value-type="string">
            <text:p>1-66</text:p>
          </table:table-cell>
          <table:table-cell table:style-name="ce21" office:value-type="float" office:value="66" calcext:value-type="float">
            <text:p>66</text:p>
          </table:table-cell>
          <table:table-cell table:style-name="ce11" office:value-type="string" calcext:value-type="string">
            <text:p>ポプリ</text:p>
          </table:table-cell>
          <table:table-cell table:style-name="ce11" table:formula="of:=[.E106]" office:value-type="string" office:string-value="ポプリ" calcext:value-type="string">
            <text:p>ポプリ</text:p>
          </table:table-cell>
          <table:table-cell table:style-name="ce11" office:value-type="string" calcext:value-type="string">
            <text:p>ぽぷり</text:p>
          </table:table-cell>
          <table:table-cell table:style-name="ce11" office:value-type="string" calcext:value-type="string">
            <text:p>第１弾ブースターパック</text:p>
          </table:table-cell>
          <table:table-cell table:style-name="ce11" table:formula="of:=VLOOKUP([.H106];[$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6];[$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6];[$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06];[$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6.png</text:p>
          </table:table-cell>
          <table:table-cell table:style-name="ce11" table:formula="of:=CONCATENATE([$JSON.$A$1];[.$C106];[$JSON.$B$1];[.$E106];[$JSON.$C$1];[.F106];[$JSON.$D$1];[.$G106];[$JSON.$E$1];IF(ISNA([.$T106]);&quot;null&quot;;&quot;&quot;&quot;&quot;&amp;[.$T106]&amp;&quot;&quot;&quot;&quot;);[$JSON.$F$1];[.$V106];[$JSON.$G$1];IF(ISNA([.$X106]);&quot;null&quot;;&quot;&quot;&quot;&quot;&amp;[.$X106]&amp;&quot;&quot;&quot;&quot;);[$JSON.$H$1];[.$AA106];[$JSON.$I$1];[.$I106];[$JSON.$J$1];[.K106];[$JSON.$K$1];[.$M106];[$JSON.$L$1];[.$P106];[$JSON.$M$1];[.$O106];[$JSON.$N$1];[.$S106];[$JSON.$O$1];[.$U106];[$JSON.$P$1];IF(ISNA([.$W106]);&quot;null&quot;;[.$W106]);[$JSON.$Q$1];[.$Y106];[$JSON.$R$1];IF([.$Z106];&quot;true&quot;;&quot;false&quot;);[$JSON.$S$1];[.$A106];[$JSON.$T$1];[.$B106];[$JSON.$U$1])" office:value-type="string" office:string-value="{&quot;id&quot;:&quot;1-66&quot;,&quot;name&quot;:&quot;ポプリ&quot;,&quot;displayName&quot;:&quot;ポプリ&quot;,&quot;kana&quot;:&quot;ぽぷり&quot;,&quot;traitText&quot;:null,&quot;ruleText&quot;:&quot;魔力ゾーンに置かれたとき、1ドローする。&quot;,&quot;legacyText&quot;:null,&quot;imageUrl&quot;:&quot;https://one-draw.jp/ijinden/cardlist/001/card/01_066.png&quot;,&quot;expansion&quot;:15,&quot;rarity&quot;:1,&quot;type&quot;:4,&quot;level&quot;:1,&quot;color&quot;:4,&quot;term&quot;:0,&quot;trait&quot;:0,&quot;power&quot;:null,&quot;legacy&quot;:0,&quot;anyNumCopies&quot;:false,&quot;orderTable&quot;:105,&quot;orderDeck&quot;:450}," calcext:value-type="string">
            <text:p>{"id":"1-66","name":"ポプリ","displayName":"ポプリ","kana":"ぽぷり","traitText":null,"ruleText":"魔力ゾーンに置かれたとき、1ドローする。","legacyText":null,"imageUrl":"https://one-draw.jp/ijinden/cardlist/001/card/01_066.png","expansion":15,"rarity":1,"type":4,"level":1,"color":4,"term":0,"trait":0,"power":null,"legacy":0,"anyNumCopies":false,"orderTable":105,"orderDeck":450},</text:p>
          </table:table-cell>
          <table:table-cell table:number-columns-repeated="16356"/>
        </table:table-row>
        <table:table-row table:style-name="ro2">
          <table:table-cell table:style-name="ce11" office:value-type="float" office:value="106" calcext:value-type="float">
            <text:p>106</text:p>
          </table:table-cell>
          <table:table-cell table:style-name="ce11" office:value-type="float" office:value="451" calcext:value-type="float">
            <text:p>451</text:p>
          </table:table-cell>
          <table:table-cell table:style-name="ce21" office:value-type="string" calcext:value-type="string">
            <text:p>1-67</text:p>
          </table:table-cell>
          <table:table-cell table:style-name="ce21" office:value-type="float" office:value="67" calcext:value-type="float">
            <text:p>67</text:p>
          </table:table-cell>
          <table:table-cell table:style-name="ce11" office:value-type="string" calcext:value-type="string">
            <text:p>ウッドスタッフ</text:p>
          </table:table-cell>
          <table:table-cell table:style-name="ce11" table:formula="of:=[.E107]" office:value-type="string" office:string-value="ウッドスタッフ" calcext:value-type="string">
            <text:p>ウッドスタッフ</text:p>
          </table:table-cell>
          <table:table-cell table:style-name="ce11" office:value-type="string" calcext:value-type="string">
            <text:p>うっどすたっふ</text:p>
          </table:table-cell>
          <table:table-cell table:style-name="ce11" office:value-type="string" calcext:value-type="string">
            <text:p>第１弾ブースターパック</text:p>
          </table:table-cell>
          <table:table-cell table:style-name="ce11" table:formula="of:=VLOOKUP([.H107];[$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0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7];[$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7];[$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07];[$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置かれているこれを、そのイジンに装備させてもよい。¶装備 : パワー+1000</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0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7.png</text:p>
          </table:table-cell>
          <table:table-cell table:style-name="ce11" table:formula="of:=CONCATENATE([$JSON.$A$1];[.$C107];[$JSON.$B$1];[.$E107];[$JSON.$C$1];[.F107];[$JSON.$D$1];[.$G107];[$JSON.$E$1];IF(ISNA([.$T107]);&quot;null&quot;;&quot;&quot;&quot;&quot;&amp;[.$T107]&amp;&quot;&quot;&quot;&quot;);[$JSON.$F$1];[.$V107];[$JSON.$G$1];IF(ISNA([.$X107]);&quot;null&quot;;&quot;&quot;&quot;&quot;&amp;[.$X107]&amp;&quot;&quot;&quot;&quot;);[$JSON.$H$1];[.$AA107];[$JSON.$I$1];[.$I107];[$JSON.$J$1];[.K107];[$JSON.$K$1];[.$M107];[$JSON.$L$1];[.$P107];[$JSON.$M$1];[.$O107];[$JSON.$N$1];[.$S107];[$JSON.$O$1];[.$U107];[$JSON.$P$1];IF(ISNA([.$W107]);&quot;null&quot;;[.$W107]);[$JSON.$Q$1];[.$Y107];[$JSON.$R$1];IF([.$Z107];&quot;true&quot;;&quot;false&quot;);[$JSON.$S$1];[.$A107];[$JSON.$T$1];[.$B107];[$JSON.$U$1])" office:value-type="string" office:string-value="{&quot;id&quot;:&quot;1-67&quot;,&quot;name&quot;:&quot;ウッドスタッフ&quot;,&quot;displayName&quot;:&quot;ウッドスタッフ&quot;,&quot;kana&quot;:&quot;うっどすたっふ&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rarity&quot;:1,&quot;type&quot;:4,&quot;level&quot;:1,&quot;color&quot;:4,&quot;term&quot;:0,&quot;trait&quot;:0,&quot;power&quot;:null,&quot;legacy&quot;:0,&quot;anyNumCopies&quot;:false,&quot;orderTable&quot;:106,&quot;orderDeck&quot;:451}," calcext:value-type="string">
            <text:p>{"id":"1-67","name":"ウッドスタッフ","displayName":"ウッドスタッフ","kana":"うっどすたっふ","traitText":null,"ruleText":"イジン召喚によってイジンが自分の戦場に置かれる際、魔力ゾーンに置かれているこれを、そのイジンに装備させてもよい。¶装備 : パワー+1000","legacyText":null,"imageUrl":"https://one-draw.jp/ijinden/cardlist/001/card/01_067.png","expansion":15,"rarity":1,"type":4,"level":1,"color":4,"term":0,"trait":0,"power":null,"legacy":0,"anyNumCopies":false,"orderTable":106,"orderDeck":451},</text:p>
          </table:table-cell>
          <table:table-cell table:number-columns-repeated="16356"/>
        </table:table-row>
        <table:table-row table:style-name="ro2">
          <table:table-cell table:style-name="ce11" office:value-type="float" office:value="107" calcext:value-type="float">
            <text:p>107</text:p>
          </table:table-cell>
          <table:table-cell table:style-name="ce11" office:value-type="float" office:value="452" calcext:value-type="float">
            <text:p>452</text:p>
          </table:table-cell>
          <table:table-cell table:style-name="ce21" office:value-type="string" calcext:value-type="string">
            <text:p>1-68</text:p>
          </table:table-cell>
          <table:table-cell table:style-name="ce21" office:value-type="float" office:value="68" calcext:value-type="float">
            <text:p>68</text:p>
          </table:table-cell>
          <table:table-cell table:style-name="ce11" office:value-type="string" calcext:value-type="string">
            <text:p>万葉集</text:p>
          </table:table-cell>
          <table:table-cell table:style-name="ce11" table:formula="of:=[.E108]" office:value-type="string" office:string-value="万葉集" calcext:value-type="string">
            <text:p>万葉集</text:p>
          </table:table-cell>
          <table:table-cell table:style-name="ce11" office:value-type="string" calcext:value-type="string">
            <text:p>まんようしゅう</text:p>
          </table:table-cell>
          <table:table-cell table:style-name="ce11" office:value-type="string" calcext:value-type="string">
            <text:p>第１弾ブースターパック</text:p>
          </table:table-cell>
          <table:table-cell table:style-name="ce11" table:formula="of:=VLOOKUP([.H108];[$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08];[$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8];[$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08];[$特性番号.$A$1:$特性番号.$B$8];2;0);0)" office:value-type="float" office:value="0" calcext:value-type="float">
            <text:p>0</text:p>
          </table:table-cell>
          <table:table-cell table:style-name="ce11"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8.png</text:p>
          </table:table-cell>
          <table:table-cell table:style-name="ce11" table:formula="of:=CONCATENATE([$JSON.$A$1];[.$C108];[$JSON.$B$1];[.$E108];[$JSON.$C$1];[.F108];[$JSON.$D$1];[.$G108];[$JSON.$E$1];IF(ISNA([.$T108]);&quot;null&quot;;&quot;&quot;&quot;&quot;&amp;[.$T108]&amp;&quot;&quot;&quot;&quot;);[$JSON.$F$1];[.$V108];[$JSON.$G$1];IF(ISNA([.$X108]);&quot;null&quot;;&quot;&quot;&quot;&quot;&amp;[.$X108]&amp;&quot;&quot;&quot;&quot;);[$JSON.$H$1];[.$AA108];[$JSON.$I$1];[.$I108];[$JSON.$J$1];[.K108];[$JSON.$K$1];[.$M108];[$JSON.$L$1];[.$P108];[$JSON.$M$1];[.$O108];[$JSON.$N$1];[.$S108];[$JSON.$O$1];[.$U108];[$JSON.$P$1];IF(ISNA([.$W108]);&quot;null&quot;;[.$W108]);[$JSON.$Q$1];[.$Y108];[$JSON.$R$1];IF([.$Z108];&quot;true&quot;;&quot;false&quot;);[$JSON.$S$1];[.$A108];[$JSON.$T$1];[.$B108];[$JSON.$U$1])" office:value-type="string" office:string-value="{&quot;id&quot;:&quot;1-68&quot;,&quot;name&quot;:&quot;万葉集&quot;,&quot;displayName&quot;:&quot;万葉集&quot;,&quot;kana&quot;:&quot;まんようしゅ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rarity&quot;:1,&quot;type&quot;:4,&quot;level&quot;:1,&quot;color&quot;:4,&quot;term&quot;:0,&quot;trait&quot;:0,&quot;power&quot;:null,&quot;legacy&quot;:3,&quot;anyNumCopies&quot;:false,&quot;orderTable&quot;:107,&quot;orderDeck&quot;:452}," calcext:value-type="string">
            <text:p>{"id":"1-68","name":"万葉集","displayName":"万葉集","kana":"まんようしゅ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rarity":1,"type":4,"level":1,"color":4,"term":0,"trait":0,"power":null,"legacy":3,"anyNumCopies":false,"orderTable":107,"orderDeck":452},</text:p>
          </table:table-cell>
          <table:table-cell table:number-columns-repeated="16356"/>
        </table:table-row>
        <table:table-row table:style-name="ro2">
          <table:table-cell table:style-name="ce11" office:value-type="float" office:value="108" calcext:value-type="float">
            <text:p>108</text:p>
          </table:table-cell>
          <table:table-cell table:style-name="ce11" office:value-type="float" office:value="482" calcext:value-type="float">
            <text:p>482</text:p>
          </table:table-cell>
          <table:table-cell table:style-name="ce21" office:value-type="string" calcext:value-type="string">
            <text:p>1-69</text:p>
          </table:table-cell>
          <table:table-cell table:style-name="ce21" office:value-type="float" office:value="69" calcext:value-type="float">
            <text:p>69</text:p>
          </table:table-cell>
          <table:table-cell table:style-name="ce11" office:value-type="string" calcext:value-type="string">
            <text:p>グリーンオーブ</text:p>
          </table:table-cell>
          <table:table-cell table:style-name="ce11" office:value-type="string" calcext:value-type="string">
            <text:p>グリーンオーブ (第1弾)</text:p>
          </table:table-cell>
          <table:table-cell table:style-name="ce11" office:value-type="string" calcext:value-type="string">
            <text:p>ぐりーんおーぶ</text:p>
          </table:table-cell>
          <table:table-cell table:style-name="ce11" office:value-type="string" calcext:value-type="string">
            <text:p>第１弾ブースターパック</text:p>
          </table:table-cell>
          <table:table-cell table:style-name="ce11" table:formula="of:=VLOOKUP([.H109];[$収録番号.$A$1:$収録番号.$B$10];2;0)" office:value-type="float" office:value="15" calcext:value-type="float">
            <text:p>15</text:p>
          </table:table-cell>
          <table:table-cell table:style-name="ce11" office:value-type="string" calcext:value-type="string">
            <text:p>R</text:p>
          </table:table-cell>
          <table:table-cell table:style-name="ce11" table:formula="of:=VLOOKUP([.J109];[$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109];[$種類番号.$A$1:$種類番号.$B$4];2;0)" office:value-type="float" office:value="4" calcext:value-type="float">
            <text:p>4</text:p>
          </table:table-cell>
          <table:table-cell table:style-name="ce11" office:value-type="string" calcext:value-type="string">
            <text:p>緑</text:p>
          </table:table-cell>
          <table:table-cell table:style-name="ce11" table:formula="of:=VLOOKUP([.N10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0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09];[$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69.png</text:p>
          </table:table-cell>
          <table:table-cell table:style-name="ce11" table:formula="of:=CONCATENATE([$JSON.$A$1];[.$C109];[$JSON.$B$1];[.$E109];[$JSON.$C$1];[.F109];[$JSON.$D$1];[.$G109];[$JSON.$E$1];IF(ISNA([.$T109]);&quot;null&quot;;&quot;&quot;&quot;&quot;&amp;[.$T109]&amp;&quot;&quot;&quot;&quot;);[$JSON.$F$1];[.$V109];[$JSON.$G$1];IF(ISNA([.$X109]);&quot;null&quot;;&quot;&quot;&quot;&quot;&amp;[.$X109]&amp;&quot;&quot;&quot;&quot;);[$JSON.$H$1];[.$AA109];[$JSON.$I$1];[.$I109];[$JSON.$J$1];[.K109];[$JSON.$K$1];[.$M109];[$JSON.$L$1];[.$P109];[$JSON.$M$1];[.$O109];[$JSON.$N$1];[.$S109];[$JSON.$O$1];[.$U109];[$JSON.$P$1];IF(ISNA([.$W109]);&quot;null&quot;;[.$W109]);[$JSON.$Q$1];[.$Y109];[$JSON.$R$1];IF([.$Z109];&quot;true&quot;;&quot;false&quot;);[$JSON.$S$1];[.$A109];[$JSON.$T$1];[.$B109];[$JSON.$U$1])" office:value-type="string" office:string-value="{&quot;id&quot;:&quot;1-69&quot;,&quot;name&quot;:&quot;グリーンオーブ&quot;,&quot;displayName&quot;:&quot;グリーンオーブ (第1弾)&quot;,&quot;kana&quot;:&quot;ぐりーんおーぶ&quot;,&quot;traitText&quot;:null,&quot;ruleText&quot;:&quot;&quot;,&quot;legacyText&quot;:&quot;復元&quot;,&quot;imageUrl&quot;:&quot;https://one-draw.jp/ijinden/cardlist/001/card/01_069.png&quot;,&quot;expansion&quot;:15,&quot;rarity&quot;:2,&quot;type&quot;:4,&quot;level&quot;:2,&quot;color&quot;:4,&quot;term&quot;:0,&quot;trait&quot;:0,&quot;power&quot;:null,&quot;legacy&quot;:3,&quot;anyNumCopies&quot;:false,&quot;orderTable&quot;:108,&quot;orderDeck&quot;:482}," calcext:value-type="string">
            <text:p>{"id":"1-69","name":"グリーンオーブ","displayName":"グリーンオーブ (第1弾)","kana":"ぐりーんおーぶ","traitText":null,"ruleText":"","legacyText":"復元","imageUrl":"https://one-draw.jp/ijinden/cardlist/001/card/01_069.png","expansion":15,"rarity":2,"type":4,"level":2,"color":4,"term":0,"trait":0,"power":null,"legacy":3,"anyNumCopies":false,"orderTable":108,"orderDeck":482},</text:p>
          </table:table-cell>
          <table:table-cell table:number-columns-repeated="16356"/>
        </table:table-row>
        <table:table-row table:style-name="ro2">
          <table:table-cell table:style-name="ce11" office:value-type="float" office:value="109" calcext:value-type="float">
            <text:p>109</text:p>
          </table:table-cell>
          <table:table-cell table:style-name="ce11" office:value-type="float" office:value="86" calcext:value-type="float">
            <text:p>86</text:p>
          </table:table-cell>
          <table:table-cell table:style-name="ce21" office:value-type="string" calcext:value-type="string">
            <text:p>1-70</text:p>
          </table:table-cell>
          <table:table-cell table:style-name="ce21" office:value-type="float" office:value="70" calcext:value-type="float">
            <text:p>70</text:p>
          </table:table-cell>
          <table:table-cell table:style-name="ce11" office:value-type="string" calcext:value-type="string">
            <text:p>ビスマルク</text:p>
          </table:table-cell>
          <table:table-cell table:style-name="ce11" table:formula="of:=[.E110]" office:value-type="string" office:string-value="ビスマルク" calcext:value-type="string">
            <text:p>ビスマルク</text:p>
          </table:table-cell>
          <table:table-cell table:style-name="ce11" office:value-type="string" calcext:value-type="string">
            <text:p>びすまるく</text:p>
          </table:table-cell>
          <table:table-cell table:style-name="ce11" office:value-type="string" calcext:value-type="string">
            <text:p>第１弾ブースターパック</text:p>
          </table:table-cell>
          <table:table-cell table:style-name="ce11" table:formula="of:=VLOOKUP([.H110];[$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1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0];[$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0];[$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10];[$特性番号.$A$1:$特性番号.$B$8];2;0);0)" office:value-type="float" office:value="0" calcext:value-type="float">
            <text:p>0</text:p>
          </table:table-cell>
          <table:table-cell table:style-name="ce11" office:value-type="string" calcext:value-type="string">
            <text:p>ダブルプレッシャー¶アタッカーになったとき、自分の戦場のイジン1体を破壊す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0.png</text:p>
          </table:table-cell>
          <table:table-cell table:style-name="ce11" table:formula="of:=CONCATENATE([$JSON.$A$1];[.$C110];[$JSON.$B$1];[.$E110];[$JSON.$C$1];[.F110];[$JSON.$D$1];[.$G110];[$JSON.$E$1];IF(ISNA([.$T110]);&quot;null&quot;;&quot;&quot;&quot;&quot;&amp;[.$T110]&amp;&quot;&quot;&quot;&quot;);[$JSON.$F$1];[.$V110];[$JSON.$G$1];IF(ISNA([.$X110]);&quot;null&quot;;&quot;&quot;&quot;&quot;&amp;[.$X110]&amp;&quot;&quot;&quot;&quot;);[$JSON.$H$1];[.$AA110];[$JSON.$I$1];[.$I110];[$JSON.$J$1];[.K110];[$JSON.$K$1];[.$M110];[$JSON.$L$1];[.$P110];[$JSON.$M$1];[.$O110];[$JSON.$N$1];[.$S110];[$JSON.$O$1];[.$U110];[$JSON.$P$1];IF(ISNA([.$W110]);&quot;null&quot;;[.$W110]);[$JSON.$Q$1];[.$Y110];[$JSON.$R$1];IF([.$Z110];&quot;true&quot;;&quot;false&quot;);[$JSON.$S$1];[.$A110];[$JSON.$T$1];[.$B110];[$JSON.$U$1])" office:value-type="string" office:string-value="{&quot;id&quot;:&quot;1-70&quot;,&quot;name&quot;:&quot;ビスマルク&quot;,&quot;displayName&quot;:&quot;ビスマルク&quot;,&quot;kana&quot;:&quot;びすまるく&quot;,&quot;traitText&quot;:null,&quot;ruleText&quot;:&quot;ダブルプレッシャー¶アタッカーになったとき、自分の戦場のイジン1体を破壊する。&quot;,&quot;legacyText&quot;:null,&quot;imageUrl&quot;:&quot;https://one-draw.jp/ijinden/cardlist/001/card/01_070.png&quot;,&quot;expansion&quot;:15,&quot;rarity&quot;:1,&quot;type&quot;:1,&quot;level&quot;:3,&quot;color&quot;:1,&quot;term&quot;:0,&quot;trait&quot;:0,&quot;power&quot;:3000,&quot;legacy&quot;:0,&quot;anyNumCopies&quot;:false,&quot;orderTable&quot;:109,&quot;orderDeck&quot;:86}," calcext:value-type="string">
            <text:p>{"id":"1-70","name":"ビスマルク","displayName":"ビスマルク","kana":"びすまるく","traitText":null,"ruleText":"ダブルプレッシャー¶アタッカーになったとき、自分の戦場のイジン1体を破壊する。","legacyText":null,"imageUrl":"https://one-draw.jp/ijinden/cardlist/001/card/01_070.png","expansion":15,"rarity":1,"type":1,"level":3,"color":1,"term":0,"trait":0,"power":3000,"legacy":0,"anyNumCopies":false,"orderTable":109,"orderDeck":86},</text:p>
          </table:table-cell>
          <table:table-cell table:number-columns-repeated="16356"/>
        </table:table-row>
        <table:table-row table:style-name="ro2">
          <table:table-cell table:style-name="ce11" office:value-type="float" office:value="110" calcext:value-type="float">
            <text:p>110</text:p>
          </table:table-cell>
          <table:table-cell table:style-name="ce11" office:value-type="float" office:value="3" calcext:value-type="float">
            <text:p>3</text:p>
          </table:table-cell>
          <table:table-cell table:style-name="ce21" office:value-type="string" calcext:value-type="string">
            <text:p>1-71</text:p>
          </table:table-cell>
          <table:table-cell table:style-name="ce21" office:value-type="float" office:value="71" calcext:value-type="float">
            <text:p>71</text:p>
          </table:table-cell>
          <table:table-cell table:style-name="ce11" office:value-type="string" calcext:value-type="string">
            <text:p>ミュンツァー</text:p>
          </table:table-cell>
          <table:table-cell table:style-name="ce11" table:formula="of:=[.E111]" office:value-type="string" office:string-value="ミュンツァー" calcext:value-type="string">
            <text:p>ミュンツァー</text:p>
          </table:table-cell>
          <table:table-cell table:style-name="ce11" office:value-type="string" calcext:value-type="string">
            <text:p>みゅんつぁー</text:p>
          </table:table-cell>
          <table:table-cell table:style-name="ce11" office:value-type="string" calcext:value-type="string">
            <text:p>第１弾ブースターパック</text:p>
          </table:table-cell>
          <table:table-cell table:style-name="ce11" table:formula="of:=VLOOKUP([.H111];[$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1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1];[$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1];[$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11];[$特性番号.$A$1:$特性番号.$B$8];2;0);0)" office:value-type="float" office:value="0" calcext:value-type="float">
            <text:p>0</text:p>
          </table:table-cell>
          <table:table-cell table:style-name="ce11" office:value-type="string" calcext:value-type="string">
            <text:p>アタッカーになったとき、自分の手札のマホウ1つを見せて発動できる。このターンの間「パワー5000以上のイジンにブロックされない」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1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1.png</text:p>
          </table:table-cell>
          <table:table-cell table:style-name="ce11" table:formula="of:=CONCATENATE([$JSON.$A$1];[.$C111];[$JSON.$B$1];[.$E111];[$JSON.$C$1];[.F111];[$JSON.$D$1];[.$G111];[$JSON.$E$1];IF(ISNA([.$T111]);&quot;null&quot;;&quot;&quot;&quot;&quot;&amp;[.$T111]&amp;&quot;&quot;&quot;&quot;);[$JSON.$F$1];[.$V111];[$JSON.$G$1];IF(ISNA([.$X111]);&quot;null&quot;;&quot;&quot;&quot;&quot;&amp;[.$X111]&amp;&quot;&quot;&quot;&quot;);[$JSON.$H$1];[.$AA111];[$JSON.$I$1];[.$I111];[$JSON.$J$1];[.K111];[$JSON.$K$1];[.$M111];[$JSON.$L$1];[.$P111];[$JSON.$M$1];[.$O111];[$JSON.$N$1];[.$S111];[$JSON.$O$1];[.$U111];[$JSON.$P$1];IF(ISNA([.$W111]);&quot;null&quot;;[.$W111]);[$JSON.$Q$1];[.$Y111];[$JSON.$R$1];IF([.$Z111];&quot;true&quot;;&quot;false&quot;);[$JSON.$S$1];[.$A111];[$JSON.$T$1];[.$B111];[$JSON.$U$1])" office:value-type="string" office:string-value="{&quot;id&quot;:&quot;1-71&quot;,&quot;name&quot;:&quot;ミュンツァー&quot;,&quot;displayName&quot;:&quot;ミュンツァー&quot;,&quot;kana&quot;:&quot;みゅんつぁ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rarity&quot;:1,&quot;type&quot;:1,&quot;level&quot;:1,&quot;color&quot;:1,&quot;term&quot;:0,&quot;trait&quot;:0,&quot;power&quot;:1000,&quot;legacy&quot;:4,&quot;anyNumCopies&quot;:false,&quot;orderTable&quot;:110,&quot;orderDeck&quot;:3}," calcext:value-type="string">
            <text:p>{"id":"1-71","name":"ミュンツァー","displayName":"ミュンツァー","kana":"みゅんつぁ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rarity":1,"type":1,"level":1,"color":1,"term":0,"trait":0,"power":1000,"legacy":4,"anyNumCopies":false,"orderTable":110,"orderDeck":3},</text:p>
          </table:table-cell>
          <table:table-cell table:number-columns-repeated="16356"/>
        </table:table-row>
        <table:table-row table:style-name="ro2">
          <table:table-cell table:style-name="ce11" office:value-type="float" office:value="111" calcext:value-type="float">
            <text:p>111</text:p>
          </table:table-cell>
          <table:table-cell table:style-name="ce11" office:value-type="float" office:value="34" calcext:value-type="float">
            <text:p>34</text:p>
          </table:table-cell>
          <table:table-cell table:style-name="ce21" office:value-type="string" calcext:value-type="string">
            <text:p>1-72</text:p>
          </table:table-cell>
          <table:table-cell table:style-name="ce21" office:value-type="float" office:value="72" calcext:value-type="float">
            <text:p>72</text:p>
          </table:table-cell>
          <table:table-cell table:style-name="ce11" office:value-type="string" calcext:value-type="string">
            <text:p>大江広元</text:p>
          </table:table-cell>
          <table:table-cell table:style-name="ce11" table:formula="of:=[.E112]" office:value-type="string" office:string-value="大江広元" calcext:value-type="string">
            <text:p>大江広元</text:p>
          </table:table-cell>
          <table:table-cell table:style-name="ce11" office:value-type="string" calcext:value-type="string">
            <text:p>おおえのひろもと</text:p>
          </table:table-cell>
          <table:table-cell table:style-name="ce11" office:value-type="string" calcext:value-type="string">
            <text:p>第１弾ブースターパック</text:p>
          </table:table-cell>
          <table:table-cell table:style-name="ce11" table:formula="of:=VLOOKUP([.H112];[$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1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2];[$種類番号.$A$1:$種類番号.$B$4];2;0)" office:value-type="float" office:value="1" calcext:value-type="float">
            <text:p>1</text:p>
          </table:table-cell>
          <table:table-cell table:style-name="ce11" office:value-type="string" calcext:value-type="string">
            <text:p>赤</text:p>
          </table:table-cell>
          <table:table-cell table:style-name="ce11" table:formula="of:=VLOOKUP([.N11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12];[$特性番号.$A$1:$特性番号.$B$8];2;0);0)" office:value-type="float" office:value="0" calcext:value-type="float">
            <text:p>0</text:p>
          </table:table-cell>
          <table:table-cell table:style-name="ce11" office:value-type="string" calcext:value-type="string">
            <text:p>相手の戦場のイジンが破壊されるたび、1ドロー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1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2.png</text:p>
          </table:table-cell>
          <table:table-cell table:style-name="ce11" table:formula="of:=CONCATENATE([$JSON.$A$1];[.$C112];[$JSON.$B$1];[.$E112];[$JSON.$C$1];[.F112];[$JSON.$D$1];[.$G112];[$JSON.$E$1];IF(ISNA([.$T112]);&quot;null&quot;;&quot;&quot;&quot;&quot;&amp;[.$T112]&amp;&quot;&quot;&quot;&quot;);[$JSON.$F$1];[.$V112];[$JSON.$G$1];IF(ISNA([.$X112]);&quot;null&quot;;&quot;&quot;&quot;&quot;&amp;[.$X112]&amp;&quot;&quot;&quot;&quot;);[$JSON.$H$1];[.$AA112];[$JSON.$I$1];[.$I112];[$JSON.$J$1];[.K112];[$JSON.$K$1];[.$M112];[$JSON.$L$1];[.$P112];[$JSON.$M$1];[.$O112];[$JSON.$N$1];[.$S112];[$JSON.$O$1];[.$U112];[$JSON.$P$1];IF(ISNA([.$W112]);&quot;null&quot;;[.$W112]);[$JSON.$Q$1];[.$Y112];[$JSON.$R$1];IF([.$Z112];&quot;true&quot;;&quot;false&quot;);[$JSON.$S$1];[.$A112];[$JSON.$T$1];[.$B112];[$JSON.$U$1])" office:value-type="string" office:string-value="{&quot;id&quot;:&quot;1-72&quot;,&quot;name&quot;:&quot;大江広元&quot;,&quot;displayName&quot;:&quot;大江広元&quot;,&quot;kana&quot;:&quot;おおえのひろもと&quot;,&quot;traitText&quot;:null,&quot;ruleText&quot;:&quot;相手の戦場のイジンが破壊されるたび、1ドローする。&quot;,&quot;legacyText&quot;:&quot;1ドローする&quot;,&quot;imageUrl&quot;:&quot;https://one-draw.jp/ijinden/cardlist/001/card/01_072.png&quot;,&quot;expansion&quot;:15,&quot;rarity&quot;:1,&quot;type&quot;:1,&quot;level&quot;:2,&quot;color&quot;:1,&quot;term&quot;:0,&quot;trait&quot;:0,&quot;power&quot;:1000,&quot;legacy&quot;:4,&quot;anyNumCopies&quot;:false,&quot;orderTable&quot;:111,&quot;orderDeck&quot;:34}," calcext:value-type="string">
            <text:p>{"id":"1-72","name":"大江広元","displayName":"大江広元","kana":"おおえのひろもと","traitText":null,"ruleText":"相手の戦場のイジンが破壊されるたび、1ドローする。","legacyText":"1ドローする","imageUrl":"https://one-draw.jp/ijinden/cardlist/001/card/01_072.png","expansion":15,"rarity":1,"type":1,"level":2,"color":1,"term":0,"trait":0,"power":1000,"legacy":4,"anyNumCopies":false,"orderTable":111,"orderDeck":34},</text:p>
          </table:table-cell>
          <table:table-cell table:number-columns-repeated="16356"/>
        </table:table-row>
        <table:table-row table:style-name="ro2">
          <table:table-cell table:style-name="ce11" office:value-type="float" office:value="112" calcext:value-type="float">
            <text:p>112</text:p>
          </table:table-cell>
          <table:table-cell table:style-name="ce11" office:value-type="float" office:value="148" calcext:value-type="float">
            <text:p>148</text:p>
          </table:table-cell>
          <table:table-cell table:style-name="ce21" office:value-type="string" calcext:value-type="string">
            <text:p>1-73</text:p>
          </table:table-cell>
          <table:table-cell table:style-name="ce21" office:value-type="float" office:value="73" calcext:value-type="float">
            <text:p>73</text:p>
          </table:table-cell>
          <table:table-cell table:style-name="ce11" office:value-type="string" calcext:value-type="string">
            <text:p>グスタフ2世アドルフ</text:p>
          </table:table-cell>
          <table:table-cell table:style-name="ce11" table:formula="of:=[.E113]" office:value-type="string" office:string-value="グスタフ2世アドルフ" calcext:value-type="string">
            <text:p>グスタフ2世アドルフ</text:p>
          </table:table-cell>
          <table:table-cell table:style-name="ce11" office:value-type="string" calcext:value-type="string">
            <text:p>ぐすたふにせいあどるふ</text:p>
          </table:table-cell>
          <table:table-cell table:style-name="ce11" office:value-type="string" calcext:value-type="string">
            <text:p>第１弾ブースターパック</text:p>
          </table:table-cell>
          <table:table-cell table:style-name="ce11" table:formula="of:=VLOOKUP([.H113];[$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1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3];[$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3];[$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13];[$特性番号.$A$1:$特性番号.$B$8];2;0);0)" office:value-type="float" office:value="0" calcext:value-type="float">
            <text:p>0</text:p>
          </table:table-cell>
          <table:table-cell table:style-name="ce11" office:value-type="string" calcext:value-type="string">
            <text:p>イジンが相手の戦場に置かれる際、そのイジンは寝ている状態で戦場に置かれる。¶ブロック+2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1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3.png</text:p>
          </table:table-cell>
          <table:table-cell table:style-name="ce11" table:formula="of:=CONCATENATE([$JSON.$A$1];[.$C113];[$JSON.$B$1];[.$E113];[$JSON.$C$1];[.F113];[$JSON.$D$1];[.$G113];[$JSON.$E$1];IF(ISNA([.$T113]);&quot;null&quot;;&quot;&quot;&quot;&quot;&amp;[.$T113]&amp;&quot;&quot;&quot;&quot;);[$JSON.$F$1];[.$V113];[$JSON.$G$1];IF(ISNA([.$X113]);&quot;null&quot;;&quot;&quot;&quot;&quot;&amp;[.$X113]&amp;&quot;&quot;&quot;&quot;);[$JSON.$H$1];[.$AA113];[$JSON.$I$1];[.$I113];[$JSON.$J$1];[.K113];[$JSON.$K$1];[.$M113];[$JSON.$L$1];[.$P113];[$JSON.$M$1];[.$O113];[$JSON.$N$1];[.$S113];[$JSON.$O$1];[.$U113];[$JSON.$P$1];IF(ISNA([.$W113]);&quot;null&quot;;[.$W113]);[$JSON.$Q$1];[.$Y113];[$JSON.$R$1];IF([.$Z113];&quot;true&quot;;&quot;false&quot;);[$JSON.$S$1];[.$A113];[$JSON.$T$1];[.$B113];[$JSON.$U$1])" office:value-type="string" office:string-value="{&quot;id&quot;:&quot;1-73&quot;,&quot;name&quot;:&quot;グスタフ2世アドルフ&quot;,&quot;displayName&quot;:&quot;グスタフ2世アドルフ&quot;,&quot;kana&quot;:&quot;ぐすたふにせいあどるふ&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rarity&quot;:1,&quot;type&quot;:1,&quot;level&quot;:4,&quot;color&quot;:2,&quot;term&quot;:0,&quot;trait&quot;:0,&quot;power&quot;:2000,&quot;legacy&quot;:4,&quot;anyNumCopies&quot;:false,&quot;orderTable&quot;:112,&quot;orderDeck&quot;:148}," calcext:value-type="string">
            <text:p>{"id":"1-73","name":"グスタフ2世アドルフ","displayName":"グスタフ2世アドルフ","kana":"ぐすたふにせいあどるふ","traitText":null,"ruleText":"イジンが相手の戦場に置かれる際、そのイジンは寝ている状態で戦場に置かれる。¶ブロック+2000","legacyText":"1ドローする","imageUrl":"https://one-draw.jp/ijinden/cardlist/001/card/01_073.png","expansion":15,"rarity":1,"type":1,"level":4,"color":2,"term":0,"trait":0,"power":2000,"legacy":4,"anyNumCopies":false,"orderTable":112,"orderDeck":148},</text:p>
          </table:table-cell>
          <table:table-cell table:number-columns-repeated="16356"/>
        </table:table-row>
        <table:table-row table:style-name="ro2">
          <table:table-cell table:style-name="ce11" office:value-type="float" office:value="113" calcext:value-type="float">
            <text:p>113</text:p>
          </table:table-cell>
          <table:table-cell table:style-name="ce11" office:value-type="float" office:value="149" calcext:value-type="float">
            <text:p>149</text:p>
          </table:table-cell>
          <table:table-cell table:style-name="ce21" office:value-type="string" calcext:value-type="string">
            <text:p>1-74</text:p>
          </table:table-cell>
          <table:table-cell table:style-name="ce21" office:value-type="float" office:value="74" calcext:value-type="float">
            <text:p>74</text:p>
          </table:table-cell>
          <table:table-cell table:style-name="ce11" office:value-type="string" calcext:value-type="string">
            <text:p>オリバー・クロムウェル</text:p>
          </table:table-cell>
          <table:table-cell table:style-name="ce11" table:formula="of:=[.E114]" office:value-type="string" office:string-value="オリバー・クロムウェル" calcext:value-type="string">
            <text:p>オリバー・クロムウェル</text:p>
          </table:table-cell>
          <table:table-cell table:style-name="ce11" office:value-type="string" calcext:value-type="string">
            <text:p>おりばーくろむうぇる</text:p>
          </table:table-cell>
          <table:table-cell table:style-name="ce11" office:value-type="string" calcext:value-type="string">
            <text:p>第１弾ブースターパック</text:p>
          </table:table-cell>
          <table:table-cell table:style-name="ce11" table:formula="of:=VLOOKUP([.H114];[$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1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4];[$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4];[$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14];[$特性番号.$A$1:$特性番号.$B$8];2;0);0)" office:value-type="float" office:value="0" calcext:value-type="float">
            <text:p>0</text:p>
          </table:table-cell>
          <table:table-cell table:style-name="ce11" office:value-type="string" calcext:value-type="string">
            <text:p>相手の魔力ゾーンの裏のカード1つにつき「アタック+1000」を得る。</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4.png</text:p>
          </table:table-cell>
          <table:table-cell table:style-name="ce11" table:formula="of:=CONCATENATE([$JSON.$A$1];[.$C114];[$JSON.$B$1];[.$E114];[$JSON.$C$1];[.F114];[$JSON.$D$1];[.$G114];[$JSON.$E$1];IF(ISNA([.$T114]);&quot;null&quot;;&quot;&quot;&quot;&quot;&amp;[.$T114]&amp;&quot;&quot;&quot;&quot;);[$JSON.$F$1];[.$V114];[$JSON.$G$1];IF(ISNA([.$X114]);&quot;null&quot;;&quot;&quot;&quot;&quot;&amp;[.$X114]&amp;&quot;&quot;&quot;&quot;);[$JSON.$H$1];[.$AA114];[$JSON.$I$1];[.$I114];[$JSON.$J$1];[.K114];[$JSON.$K$1];[.$M114];[$JSON.$L$1];[.$P114];[$JSON.$M$1];[.$O114];[$JSON.$N$1];[.$S114];[$JSON.$O$1];[.$U114];[$JSON.$P$1];IF(ISNA([.$W114]);&quot;null&quot;;[.$W114]);[$JSON.$Q$1];[.$Y114];[$JSON.$R$1];IF([.$Z114];&quot;true&quot;;&quot;false&quot;);[$JSON.$S$1];[.$A114];[$JSON.$T$1];[.$B114];[$JSON.$U$1])" office:value-type="string" office:string-value="{&quot;id&quot;:&quot;1-74&quot;,&quot;name&quot;:&quot;オリバー・クロムウェル&quot;,&quot;displayName&quot;:&quot;オリバー・クロムウェル&quot;,&quot;kana&quot;:&quot;おりばーくろむうぇる&quot;,&quot;traitText&quot;:null,&quot;ruleText&quot;:&quot;相手の魔力ゾーンの裏のカード1つにつき「アタック+1000」を得る。&quot;,&quot;legacyText&quot;:null,&quot;imageUrl&quot;:&quot;https://one-draw.jp/ijinden/cardlist/001/card/01_074.png&quot;,&quot;expansion&quot;:15,&quot;rarity&quot;:1,&quot;type&quot;:1,&quot;level&quot;:4,&quot;color&quot;:2,&quot;term&quot;:0,&quot;trait&quot;:0,&quot;power&quot;:3000,&quot;legacy&quot;:0,&quot;anyNumCopies&quot;:false,&quot;orderTable&quot;:113,&quot;orderDeck&quot;:149}," calcext:value-type="string">
            <text:p>{"id":"1-74","name":"オリバー・クロムウェル","displayName":"オリバー・クロムウェル","kana":"おりばーくろむうぇる","traitText":null,"ruleText":"相手の魔力ゾーンの裏のカード1つにつき「アタック+1000」を得る。","legacyText":null,"imageUrl":"https://one-draw.jp/ijinden/cardlist/001/card/01_074.png","expansion":15,"rarity":1,"type":1,"level":4,"color":2,"term":0,"trait":0,"power":3000,"legacy":0,"anyNumCopies":false,"orderTable":113,"orderDeck":149},</text:p>
          </table:table-cell>
          <table:table-cell table:number-columns-repeated="16356"/>
        </table:table-row>
        <table:table-row table:style-name="ro2">
          <table:table-cell table:style-name="ce11" office:value-type="float" office:value="114" calcext:value-type="float">
            <text:p>114</text:p>
          </table:table-cell>
          <table:table-cell table:style-name="ce11" office:value-type="float" office:value="150" calcext:value-type="float">
            <text:p>150</text:p>
          </table:table-cell>
          <table:table-cell table:style-name="ce21" office:value-type="string" calcext:value-type="string">
            <text:p>1-75</text:p>
          </table:table-cell>
          <table:table-cell table:style-name="ce21" office:value-type="float" office:value="75" calcext:value-type="float">
            <text:p>75</text:p>
          </table:table-cell>
          <table:table-cell table:style-name="ce11" office:value-type="string" calcext:value-type="string">
            <text:p>衛青</text:p>
          </table:table-cell>
          <table:table-cell table:style-name="ce11" table:formula="of:=[.E115]" office:value-type="string" office:string-value="衛青" calcext:value-type="string">
            <text:p>衛青</text:p>
          </table:table-cell>
          <table:table-cell table:style-name="ce11" office:value-type="string" calcext:value-type="string">
            <text:p>えいせい</text:p>
          </table:table-cell>
          <table:table-cell table:style-name="ce11" office:value-type="string" calcext:value-type="string">
            <text:p>第１弾ブースターパック</text:p>
          </table:table-cell>
          <table:table-cell table:style-name="ce11" table:formula="of:=VLOOKUP([.H115];[$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1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15];[$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15];[$特性番号.$A$1:$特性番号.$B$8];2;0);0)" office:value-type="float" office:value="0" calcext:value-type="float">
            <text:p>0</text:p>
          </table:table-cell>
          <table:table-cell table:style-name="ce11" office:value-type="string" calcext:value-type="string">
            <text:p>戦場に置かれたとき、自分の戦場のイジンが2体以下なら発動する。1ドローして、イジン召喚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11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5.png</text:p>
          </table:table-cell>
          <table:table-cell table:style-name="ce11" table:formula="of:=CONCATENATE([$JSON.$A$1];[.$C115];[$JSON.$B$1];[.$E115];[$JSON.$C$1];[.F115];[$JSON.$D$1];[.$G115];[$JSON.$E$1];IF(ISNA([.$T115]);&quot;null&quot;;&quot;&quot;&quot;&quot;&amp;[.$T115]&amp;&quot;&quot;&quot;&quot;);[$JSON.$F$1];[.$V115];[$JSON.$G$1];IF(ISNA([.$X115]);&quot;null&quot;;&quot;&quot;&quot;&quot;&amp;[.$X115]&amp;&quot;&quot;&quot;&quot;);[$JSON.$H$1];[.$AA115];[$JSON.$I$1];[.$I115];[$JSON.$J$1];[.K115];[$JSON.$K$1];[.$M115];[$JSON.$L$1];[.$P115];[$JSON.$M$1];[.$O115];[$JSON.$N$1];[.$S115];[$JSON.$O$1];[.$U115];[$JSON.$P$1];IF(ISNA([.$W115]);&quot;null&quot;;[.$W115]);[$JSON.$Q$1];[.$Y115];[$JSON.$R$1];IF([.$Z115];&quot;true&quot;;&quot;false&quot;);[$JSON.$S$1];[.$A115];[$JSON.$T$1];[.$B115];[$JSON.$U$1])" office:value-type="string" office:string-value="{&quot;id&quot;:&quot;1-75&quot;,&quot;name&quot;:&quot;衛青&quot;,&quot;displayName&quot;:&quot;衛青&quot;,&quot;kana&quot;:&quot;えいせい&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rarity&quot;:1,&quot;type&quot;:1,&quot;level&quot;:4,&quot;color&quot;:2,&quot;term&quot;:0,&quot;trait&quot;:0,&quot;power&quot;:3000,&quot;legacy&quot;:4,&quot;anyNumCopies&quot;:false,&quot;orderTable&quot;:114,&quot;orderDeck&quot;:150}," calcext:value-type="string">
            <text:p>{"id":"1-75","name":"衛青","displayName":"衛青","kana":"えいせい","traitText":null,"ruleText":"戦場に置かれたとき、自分の戦場のイジンが2体以下なら発動する。1ドローして、イジン召喚権+1する。","legacyText":"1ドローする","imageUrl":"https://one-draw.jp/ijinden/cardlist/001/card/01_075.png","expansion":15,"rarity":1,"type":1,"level":4,"color":2,"term":0,"trait":0,"power":3000,"legacy":4,"anyNumCopies":false,"orderTable":114,"orderDeck":150},</text:p>
          </table:table-cell>
          <table:table-cell table:number-columns-repeated="16356"/>
        </table:table-row>
        <table:table-row table:style-name="ro2">
          <table:table-cell table:style-name="ce11" office:value-type="float" office:value="115" calcext:value-type="float">
            <text:p>115</text:p>
          </table:table-cell>
          <table:table-cell table:style-name="ce11" office:value-type="float" office:value="208" calcext:value-type="float">
            <text:p>208</text:p>
          </table:table-cell>
          <table:table-cell table:style-name="ce21" office:value-type="string" calcext:value-type="string">
            <text:p>1-76</text:p>
          </table:table-cell>
          <table:table-cell table:style-name="ce21" office:value-type="float" office:value="76" calcext:value-type="float">
            <text:p>76</text:p>
          </table:table-cell>
          <table:table-cell table:style-name="ce11" office:value-type="string" calcext:value-type="string">
            <text:p>シーボルト</text:p>
          </table:table-cell>
          <table:table-cell table:style-name="ce11" table:formula="of:=[.E116]" office:value-type="string" office:string-value="シーボルト" calcext:value-type="string">
            <text:p>シーボルト</text:p>
          </table:table-cell>
          <table:table-cell table:style-name="ce11" office:value-type="string" calcext:value-type="string">
            <text:p>しーぼると</text:p>
          </table:table-cell>
          <table:table-cell table:style-name="ce11" office:value-type="string" calcext:value-type="string">
            <text:p>第１弾ブースターパック</text:p>
          </table:table-cell>
          <table:table-cell table:style-name="ce11" table:formula="of:=VLOOKUP([.H116];[$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6];[$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6];[$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16];[$特性番号.$A$1:$特性番号.$B$8];2;0);0)" office:value-type="float" office:value="0" calcext:value-type="float">
            <text:p>0</text:p>
          </table:table-cell>
          <table:table-cell table:style-name="ce11" office:value-type="string" calcext:value-type="string">
            <text:p>自分の墓地の「美術」カード1つにつき「パワー+1000」を得る。¶パワー7000以上の間「アタッカーになったとき、これを起こす」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1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6.png</text:p>
          </table:table-cell>
          <table:table-cell table:style-name="ce11" table:formula="of:=CONCATENATE([$JSON.$A$1];[.$C116];[$JSON.$B$1];[.$E116];[$JSON.$C$1];[.F116];[$JSON.$D$1];[.$G116];[$JSON.$E$1];IF(ISNA([.$T116]);&quot;null&quot;;&quot;&quot;&quot;&quot;&amp;[.$T116]&amp;&quot;&quot;&quot;&quot;);[$JSON.$F$1];[.$V116];[$JSON.$G$1];IF(ISNA([.$X116]);&quot;null&quot;;&quot;&quot;&quot;&quot;&amp;[.$X116]&amp;&quot;&quot;&quot;&quot;);[$JSON.$H$1];[.$AA116];[$JSON.$I$1];[.$I116];[$JSON.$J$1];[.K116];[$JSON.$K$1];[.$M116];[$JSON.$L$1];[.$P116];[$JSON.$M$1];[.$O116];[$JSON.$N$1];[.$S116];[$JSON.$O$1];[.$U116];[$JSON.$P$1];IF(ISNA([.$W116]);&quot;null&quot;;[.$W116]);[$JSON.$Q$1];[.$Y116];[$JSON.$R$1];IF([.$Z116];&quot;true&quot;;&quot;false&quot;);[$JSON.$S$1];[.$A116];[$JSON.$T$1];[.$B116];[$JSON.$U$1])" office:value-type="string" office:string-value="{&quot;id&quot;:&quot;1-76&quot;,&quot;name&quot;:&quot;シーボルト&quot;,&quot;displayName&quot;:&quot;シーボルト&quot;,&quot;kana&quot;:&quot;しーぼると&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rarity&quot;:1,&quot;type&quot;:1,&quot;level&quot;:5,&quot;color&quot;:4,&quot;term&quot;:0,&quot;trait&quot;:0,&quot;power&quot;:4000,&quot;legacy&quot;:0,&quot;anyNumCopies&quot;:false,&quot;orderTable&quot;:115,&quot;orderDeck&quot;:208}," calcext:value-type="string">
            <text:p>{"id":"1-76","name":"シーボルト","displayName":"シーボルト","kana":"しーぼると","traitText":null,"ruleText":"自分の墓地の「美術」カード1つにつき「パワー+1000」を得る。¶パワー7000以上の間「アタッカーになったとき、これを起こす」を得る。","legacyText":null,"imageUrl":"https://one-draw.jp/ijinden/cardlist/001/card/01_076.png","expansion":15,"rarity":1,"type":1,"level":5,"color":4,"term":0,"trait":0,"power":4000,"legacy":0,"anyNumCopies":false,"orderTable":115,"orderDeck":208},</text:p>
          </table:table-cell>
          <table:table-cell table:number-columns-repeated="16356"/>
        </table:table-row>
        <table:table-row table:style-name="ro2">
          <table:table-cell table:style-name="ce11" office:value-type="float" office:value="116" calcext:value-type="float">
            <text:p>116</text:p>
          </table:table-cell>
          <table:table-cell table:style-name="ce11" office:value-type="float" office:value="58" calcext:value-type="float">
            <text:p>58</text:p>
          </table:table-cell>
          <table:table-cell table:style-name="ce21" office:value-type="string" calcext:value-type="string">
            <text:p>1-77</text:p>
          </table:table-cell>
          <table:table-cell table:style-name="ce21" office:value-type="float" office:value="77" calcext:value-type="float">
            <text:p>77</text:p>
          </table:table-cell>
          <table:table-cell table:style-name="ce11" office:value-type="string" calcext:value-type="string">
            <text:p>乾隆帝</text:p>
          </table:table-cell>
          <table:table-cell table:style-name="ce11" table:formula="of:=[.E117]" office:value-type="string" office:string-value="乾隆帝" calcext:value-type="string">
            <text:p>乾隆帝</text:p>
          </table:table-cell>
          <table:table-cell table:style-name="ce11" office:value-type="string" calcext:value-type="string">
            <text:p>けんりゅうてい</text:p>
          </table:table-cell>
          <table:table-cell table:style-name="ce11" office:value-type="string" calcext:value-type="string">
            <text:p>第１弾ブースターパック</text:p>
          </table:table-cell>
          <table:table-cell table:style-name="ce11" table:formula="of:=VLOOKUP([.H117];[$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7];[$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7];[$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17];[$特性番号.$A$1:$特性番号.$B$8];2;0);0)" office:value-type="float" office:value="0" calcext:value-type="float">
            <text:p>0</text:p>
          </table:table-cell>
          <table:table-cell table:style-name="ce11"/>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1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7.png</text:p>
          </table:table-cell>
          <table:table-cell table:style-name="ce11" table:formula="of:=CONCATENATE([$JSON.$A$1];[.$C117];[$JSON.$B$1];[.$E117];[$JSON.$C$1];[.F117];[$JSON.$D$1];[.$G117];[$JSON.$E$1];IF(ISNA([.$T117]);&quot;null&quot;;&quot;&quot;&quot;&quot;&amp;[.$T117]&amp;&quot;&quot;&quot;&quot;);[$JSON.$F$1];[.$V117];[$JSON.$G$1];IF(ISNA([.$X117]);&quot;null&quot;;&quot;&quot;&quot;&quot;&amp;[.$X117]&amp;&quot;&quot;&quot;&quot;);[$JSON.$H$1];[.$AA117];[$JSON.$I$1];[.$I117];[$JSON.$J$1];[.K117];[$JSON.$K$1];[.$M117];[$JSON.$L$1];[.$P117];[$JSON.$M$1];[.$O117];[$JSON.$N$1];[.$S117];[$JSON.$O$1];[.$U117];[$JSON.$P$1];IF(ISNA([.$W117]);&quot;null&quot;;[.$W117]);[$JSON.$Q$1];[.$Y117];[$JSON.$R$1];IF([.$Z117];&quot;true&quot;;&quot;false&quot;);[$JSON.$S$1];[.$A117];[$JSON.$T$1];[.$B117];[$JSON.$U$1])" office:value-type="string" office:string-value="{&quot;id&quot;:&quot;1-77&quot;,&quot;name&quot;:&quot;乾隆帝&quot;,&quot;displayName&quot;:&quot;乾隆帝&quot;,&quot;kana&quot;:&quot;けんりゅうてい&quot;,&quot;traitText&quot;:null,&quot;ruleText&quot;:&quot;&quot;,&quot;legacyText&quot;:null,&quot;imageUrl&quot;:&quot;https://one-draw.jp/ijinden/cardlist/001/card/01_077.png&quot;,&quot;expansion&quot;:15,&quot;rarity&quot;:1,&quot;type&quot;:1,&quot;level&quot;:2,&quot;color&quot;:4,&quot;term&quot;:0,&quot;trait&quot;:0,&quot;power&quot;:3000,&quot;legacy&quot;:0,&quot;anyNumCopies&quot;:false,&quot;orderTable&quot;:116,&quot;orderDeck&quot;:58}," calcext:value-type="string">
            <text:p>{"id":"1-77","name":"乾隆帝","displayName":"乾隆帝","kana":"けんりゅうてい","traitText":null,"ruleText":"","legacyText":null,"imageUrl":"https://one-draw.jp/ijinden/cardlist/001/card/01_077.png","expansion":15,"rarity":1,"type":1,"level":2,"color":4,"term":0,"trait":0,"power":3000,"legacy":0,"anyNumCopies":false,"orderTable":116,"orderDeck":58},</text:p>
          </table:table-cell>
          <table:table-cell table:number-columns-repeated="16356"/>
        </table:table-row>
        <table:table-row table:style-name="ro2">
          <table:table-cell table:style-name="ce11" office:value-type="float" office:value="117" calcext:value-type="float">
            <text:p>117</text:p>
          </table:table-cell>
          <table:table-cell table:style-name="ce11" office:value-type="float" office:value="111" calcext:value-type="float">
            <text:p>111</text:p>
          </table:table-cell>
          <table:table-cell table:style-name="ce21" office:value-type="string" calcext:value-type="string">
            <text:p>1-78</text:p>
          </table:table-cell>
          <table:table-cell table:style-name="ce21" office:value-type="float" office:value="78" calcext:value-type="float">
            <text:p>78</text:p>
          </table:table-cell>
          <table:table-cell table:style-name="ce11" office:value-type="string" calcext:value-type="string">
            <text:p>小野好古</text:p>
          </table:table-cell>
          <table:table-cell table:style-name="ce11" table:formula="of:=[.E118]" office:value-type="string" office:string-value="小野好古" calcext:value-type="string">
            <text:p>小野好古</text:p>
          </table:table-cell>
          <table:table-cell table:style-name="ce11" office:value-type="string" calcext:value-type="string">
            <text:p>おののよしふる</text:p>
          </table:table-cell>
          <table:table-cell table:style-name="ce11" office:value-type="string" calcext:value-type="string">
            <text:p>第１弾ブースターパック</text:p>
          </table:table-cell>
          <table:table-cell table:style-name="ce11" table:formula="of:=VLOOKUP([.H118];[$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8];[$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8];[$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1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18];[$特性番号.$A$1:$特性番号.$B$8];2;0);0)" office:value-type="float" office:value="0" calcext:value-type="float">
            <text:p>0</text:p>
          </table:table-cell>
          <table:table-cell table:style-name="ce11" office:value-type="string" calcext:value-type="string">
            <text:p>戦場に置かれたとき、自分の手札のハイケイ1つを見せて発動できる。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1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8.png</text:p>
          </table:table-cell>
          <table:table-cell table:style-name="ce11" table:formula="of:=CONCATENATE([$JSON.$A$1];[.$C118];[$JSON.$B$1];[.$E118];[$JSON.$C$1];[.F118];[$JSON.$D$1];[.$G118];[$JSON.$E$1];IF(ISNA([.$T118]);&quot;null&quot;;&quot;&quot;&quot;&quot;&amp;[.$T118]&amp;&quot;&quot;&quot;&quot;);[$JSON.$F$1];[.$V118];[$JSON.$G$1];IF(ISNA([.$X118]);&quot;null&quot;;&quot;&quot;&quot;&quot;&amp;[.$X118]&amp;&quot;&quot;&quot;&quot;);[$JSON.$H$1];[.$AA118];[$JSON.$I$1];[.$I118];[$JSON.$J$1];[.K118];[$JSON.$K$1];[.$M118];[$JSON.$L$1];[.$P118];[$JSON.$M$1];[.$O118];[$JSON.$N$1];[.$S118];[$JSON.$O$1];[.$U118];[$JSON.$P$1];IF(ISNA([.$W118]);&quot;null&quot;;[.$W118]);[$JSON.$Q$1];[.$Y118];[$JSON.$R$1];IF([.$Z118];&quot;true&quot;;&quot;false&quot;);[$JSON.$S$1];[.$A118];[$JSON.$T$1];[.$B118];[$JSON.$U$1])" office:value-type="string" office:string-value="{&quot;id&quot;:&quot;1-78&quot;,&quot;name&quot;:&quot;小野好古&quot;,&quot;displayName&quot;:&quot;小野好古&quot;,&quot;kana&quot;:&quot;おののよしふる&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rarity&quot;:1,&quot;type&quot;:1,&quot;level&quot;:3,&quot;color&quot;:4,&quot;term&quot;:0,&quot;trait&quot;:0,&quot;power&quot;:2000,&quot;legacy&quot;:4,&quot;anyNumCopies&quot;:false,&quot;orderTable&quot;:117,&quot;orderDeck&quot;:111}," calcext:value-type="string">
            <text:p>{"id":"1-78","name":"小野好古","displayName":"小野好古","kana":"おののよしふる","traitText":null,"ruleText":"戦場に置かれたとき、自分の手札のハイケイ1つを見せて発動できる。1ドローする。","legacyText":"1ドローする","imageUrl":"https://one-draw.jp/ijinden/cardlist/001/card/01_078.png","expansion":15,"rarity":1,"type":1,"level":3,"color":4,"term":0,"trait":0,"power":2000,"legacy":4,"anyNumCopies":false,"orderTable":117,"orderDeck":111},</text:p>
          </table:table-cell>
          <table:table-cell table:number-columns-repeated="16356"/>
        </table:table-row>
        <table:table-row table:style-name="ro2">
          <table:table-cell table:style-name="ce11" office:value-type="float" office:value="118" calcext:value-type="float">
            <text:p>118</text:p>
          </table:table-cell>
          <table:table-cell table:style-name="ce11" office:value-type="float" office:value="209" calcext:value-type="float">
            <text:p>209</text:p>
          </table:table-cell>
          <table:table-cell table:style-name="ce21" office:value-type="string" calcext:value-type="string">
            <text:p>1-79</text:p>
          </table:table-cell>
          <table:table-cell table:style-name="ce21" office:value-type="float" office:value="79" calcext:value-type="float">
            <text:p>79</text:p>
          </table:table-cell>
          <table:table-cell table:style-name="ce11" office:value-type="string" calcext:value-type="string">
            <text:p>アレッサンドロ・ヴァリニャーノ</text:p>
          </table:table-cell>
          <table:table-cell table:style-name="ce11" table:formula="of:=[.E119]" office:value-type="string" office:string-value="アレッサンドロ・ヴァリニャーノ" calcext:value-type="string">
            <text:p>アレッサンドロ・ヴァリニャーノ</text:p>
          </table:table-cell>
          <table:table-cell table:style-name="ce11" office:value-type="string" calcext:value-type="string">
            <text:p>あれっさんどろゔぁりにゃーの</text:p>
          </table:table-cell>
          <table:table-cell table:style-name="ce11" office:value-type="string" calcext:value-type="string">
            <text:p>第１弾ブースターパック</text:p>
          </table:table-cell>
          <table:table-cell table:style-name="ce11" table:formula="of:=VLOOKUP([.H119];[$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19];[$種類番号.$A$1:$種類番号.$B$4];2;0)" office:value-type="float" office:value="1" calcext:value-type="float">
            <text:p>1</text:p>
          </table:table-cell>
          <table:table-cell table:style-name="ce11" office:value-type="string" calcext:value-type="string">
            <text:p>緑</text:p>
          </table:table-cell>
          <table:table-cell table:style-name="ce11" table:formula="of:=VLOOKUP([.N119];[$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19];[$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119];[$特性番号.$A$1:$特性番号.$B$8];2;0);0)" office:value-type="float" office:value="0" calcext:value-type="float">
            <text:p>0</text:p>
          </table:table-cell>
          <table:table-cell table:style-name="ce11"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1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79.png</text:p>
          </table:table-cell>
          <table:table-cell table:style-name="ce11" table:formula="of:=CONCATENATE([$JSON.$A$1];[.$C119];[$JSON.$B$1];[.$E119];[$JSON.$C$1];[.F119];[$JSON.$D$1];[.$G119];[$JSON.$E$1];IF(ISNA([.$T119]);&quot;null&quot;;&quot;&quot;&quot;&quot;&amp;[.$T119]&amp;&quot;&quot;&quot;&quot;);[$JSON.$F$1];[.$V119];[$JSON.$G$1];IF(ISNA([.$X119]);&quot;null&quot;;&quot;&quot;&quot;&quot;&amp;[.$X119]&amp;&quot;&quot;&quot;&quot;);[$JSON.$H$1];[.$AA119];[$JSON.$I$1];[.$I119];[$JSON.$J$1];[.K119];[$JSON.$K$1];[.$M119];[$JSON.$L$1];[.$P119];[$JSON.$M$1];[.$O119];[$JSON.$N$1];[.$S119];[$JSON.$O$1];[.$U119];[$JSON.$P$1];IF(ISNA([.$W119]);&quot;null&quot;;[.$W119]);[$JSON.$Q$1];[.$Y119];[$JSON.$R$1];IF([.$Z119];&quot;true&quot;;&quot;false&quot;);[$JSON.$S$1];[.$A119];[$JSON.$T$1];[.$B119];[$JSON.$U$1])" office:value-type="string" office:string-value="{&quot;id&quot;:&quot;1-79&quot;,&quot;name&quot;:&quot;アレッサンドロ・ヴァリニャーノ&quot;,&quot;displayName&quot;:&quot;アレッサンドロ・ヴァリニャーノ&quot;,&quot;kana&quot;:&quot;あれっさんどろゔぁりにゃーの&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rarity&quot;:1,&quot;type&quot;:1,&quot;level&quot;:5,&quot;color&quot;:4,&quot;term&quot;:1,&quot;trait&quot;:0,&quot;power&quot;:4000,&quot;legacy&quot;:0,&quot;anyNumCopies&quot;:false,&quot;orderTable&quot;:118,&quot;orderDeck&quot;:209}," calcext:value-type="string">
            <text:p>{"id":"1-79","name":"アレッサンドロ・ヴァリニャーノ","displayName":"アレッサンドロ・ヴァリニャーノ","kana":"あれっさんどろゔぁりにゃーの","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rarity":1,"type":1,"level":5,"color":4,"term":1,"trait":0,"power":4000,"legacy":0,"anyNumCopies":false,"orderTable":118,"orderDeck":209},</text:p>
          </table:table-cell>
          <table:table-cell table:number-columns-repeated="16356"/>
        </table:table-row>
        <table:table-row table:style-name="ro2">
          <table:table-cell table:style-name="ce11" office:value-type="float" office:value="119" calcext:value-type="float">
            <text:p>119</text:p>
          </table:table-cell>
          <table:table-cell table:style-name="ce11" office:value-type="float" office:value="244" calcext:value-type="float">
            <text:p>244</text:p>
          </table:table-cell>
          <table:table-cell table:style-name="ce21" office:value-type="string" calcext:value-type="string">
            <text:p>1-80</text:p>
          </table:table-cell>
          <table:table-cell table:style-name="ce21" office:value-type="float" office:value="80" calcext:value-type="float">
            <text:p>80</text:p>
          </table:table-cell>
          <table:table-cell table:style-name="ce11" office:value-type="string" calcext:value-type="string">
            <text:p>角倉了以</text:p>
          </table:table-cell>
          <table:table-cell table:style-name="ce11" table:formula="of:=[.E120]" office:value-type="string" office:string-value="角倉了以" calcext:value-type="string">
            <text:p>角倉了以</text:p>
          </table:table-cell>
          <table:table-cell table:style-name="ce11" office:value-type="string" calcext:value-type="string">
            <text:p>すみのくらりょうい</text:p>
          </table:table-cell>
          <table:table-cell table:style-name="ce11" office:value-type="string" calcext:value-type="string">
            <text:p>第１弾ブースターパック</text:p>
          </table:table-cell>
          <table:table-cell table:style-name="ce11" table:formula="of:=VLOOKUP([.H120];[$収録番号.$A$1:$収録番号.$B$10];2;0)" office:value-type="float" office:value="15" calcext:value-type="float">
            <text:p>15</text:p>
          </table:table-cell>
          <table:table-cell table:style-name="ce11" office:value-type="string" calcext:value-type="string">
            <text:p>N</text:p>
          </table:table-cell>
          <table:table-cell table:style-name="ce11" table:formula="of:=VLOOKUP([.J1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0];[$種類番号.$A$1:$種類番号.$B$4];2;0)" office:value-type="float" office:value="1" calcext:value-type="float">
            <text:p>1</text:p>
          </table:table-cell>
          <table:table-cell table:style-name="ce11" office:value-type="string" calcext:value-type="string">
            <text:p>緑</text:p>
          </table:table-cell>
          <table:table-cell table:style-name="ce11" table:formula="of:=VLOOKUP([.N120];[$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20];[$特性番号.$A$1:$特性番号.$B$8];2;0);0)" office:value-type="float" office:value="0" calcext:value-type="float">
            <text:p>0</text:p>
          </table:table-cell>
          <table:table-cell table:style-name="ce11" office:value-type="string" calcext:value-type="string">
            <text:p>「航海」が発動したとき、相手の戦場のガーディアン1体を裏のまま魔力ゾーンに置く。</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12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1/card/01_080.png</text:p>
          </table:table-cell>
          <table:table-cell table:style-name="ce11" table:formula="of:=CONCATENATE([$JSON.$A$1];[.$C120];[$JSON.$B$1];[.$E120];[$JSON.$C$1];[.F120];[$JSON.$D$1];[.$G120];[$JSON.$E$1];IF(ISNA([.$T120]);&quot;null&quot;;&quot;&quot;&quot;&quot;&amp;[.$T120]&amp;&quot;&quot;&quot;&quot;);[$JSON.$F$1];[.$V120];[$JSON.$G$1];IF(ISNA([.$X120]);&quot;null&quot;;&quot;&quot;&quot;&quot;&amp;[.$X120]&amp;&quot;&quot;&quot;&quot;);[$JSON.$H$1];[.$AA120];[$JSON.$I$1];[.$I120];[$JSON.$J$1];[.K120];[$JSON.$K$1];[.$M120];[$JSON.$L$1];[.$P120];[$JSON.$M$1];[.$O120];[$JSON.$N$1];[.$S120];[$JSON.$O$1];[.$U120];[$JSON.$P$1];IF(ISNA([.$W120]);&quot;null&quot;;[.$W120]);[$JSON.$Q$1];[.$Y120];[$JSON.$R$1];IF([.$Z120];&quot;true&quot;;&quot;false&quot;);[$JSON.$S$1];[.$A120];[$JSON.$T$1];[.$B120];[$JSON.$U$1])" office:value-type="string" office:string-value="{&quot;id&quot;:&quot;1-80&quot;,&quot;name&quot;:&quot;角倉了以&quot;,&quot;displayName&quot;:&quot;角倉了以&quot;,&quot;kana&quot;:&quot;すみのくらりょうい&quot;,&quot;traitText&quot;:null,&quot;ruleText&quot;:&quot;「航海」が発動したとき、相手の戦場のガーディアン1体を裏のまま魔力ゾーンに置く。&quot;,&quot;legacyText&quot;:null,&quot;imageUrl&quot;:&quot;https://one-draw.jp/ijinden/cardlist/001/card/01_080.png&quot;,&quot;expansion&quot;:15,&quot;rarity&quot;:1,&quot;type&quot;:1,&quot;level&quot;:6,&quot;color&quot;:4,&quot;term&quot;:0,&quot;trait&quot;:0,&quot;power&quot;:6000,&quot;legacy&quot;:0,&quot;anyNumCopies&quot;:false,&quot;orderTable&quot;:119,&quot;orderDeck&quot;:244}," calcext:value-type="string">
            <text:p>{"id":"1-80","name":"角倉了以","displayName":"角倉了以","kana":"すみのくらりょうい","traitText":null,"ruleText":"「航海」が発動したとき、相手の戦場のガーディアン1体を裏のまま魔力ゾーンに置く。","legacyText":null,"imageUrl":"https://one-draw.jp/ijinden/cardlist/001/card/01_080.png","expansion":15,"rarity":1,"type":1,"level":6,"color":4,"term":0,"trait":0,"power":6000,"legacy":0,"anyNumCopies":false,"orderTable":119,"orderDeck":244},</text:p>
          </table:table-cell>
          <table:table-cell table:number-columns-repeated="16356"/>
        </table:table-row>
        <table:table-row table:style-name="ro2">
          <table:table-cell table:style-name="ce11" office:value-type="float" office:value="120" calcext:value-type="float">
            <text:p>120</text:p>
          </table:table-cell>
          <table:table-cell table:style-name="ce11" office:value-type="float" office:value="248" calcext:value-type="float">
            <text:p>248</text:p>
          </table:table-cell>
          <table:table-cell table:style-name="ce21" office:value-type="string" calcext:value-type="string">
            <text:p>Y-1</text:p>
          </table:table-cell>
          <table:table-cell table:style-name="ce21" office:value-type="float" office:value="1" calcext:value-type="float">
            <text:p>1</text:p>
          </table:table-cell>
          <table:table-cell table:style-name="ce11" office:value-type="string" calcext:value-type="string">
            <text:p>諸葛亮</text:p>
          </table:table-cell>
          <table:table-cell table:style-name="ce11" table:formula="of:=[.E121]" office:value-type="string" office:string-value="諸葛亮" calcext:value-type="string">
            <text:p>諸葛亮</text:p>
          </table:table-cell>
          <table:table-cell table:style-name="ce11" office:value-type="string" calcext:value-type="string">
            <text:p>しょかつりょう</text:p>
          </table:table-cell>
          <table:table-cell table:style-name="ce11" office:value-type="string" calcext:value-type="string">
            <text:p>三国の英傑デッキ</text:p>
          </table:table-cell>
          <table:table-cell table:style-name="ce11" table:formula="of:=VLOOKUP([.H121];[$収録番号.$A$1:$収録番号.$B$10];2;0)" office:value-type="float" office:value="20" calcext:value-type="float">
            <text:p>20</text:p>
          </table:table-cell>
          <table:table-cell table:style-name="ce11" office:value-type="string" calcext:value-type="string">
            <text:p>SR</text:p>
          </table:table-cell>
          <table:table-cell table:style-name="ce11" table:formula="of:=VLOOKUP([.J12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2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1];[$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21];[$特性番号.$A$1:$特性番号.$B$8];2;0);0)" office:value-type="float" office:value="0" calcext:value-type="float">
            <text:p>0</text:p>
          </table:table-cell>
          <table:table-cell table:style-name="ce11"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table:style-name="ce11" office:value-type="float" office:value="4000" calcext:value-type="float">
            <text:p>4000</text:p>
          </table:table-cell>
          <table:table-cell table:style-name="ce25" office:value-type="string" calcext:value-type="string">
            <text:p>反魂</text:p>
          </table:table-cell>
          <table:table-cell table:style-name="ce11" table:formula="of:=IFERROR(VLOOKUP([.$X121];[$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1.png</text:p>
          </table:table-cell>
          <table:table-cell table:style-name="ce11" table:formula="of:=CONCATENATE([$JSON.$A$1];[.$C121];[$JSON.$B$1];[.$E121];[$JSON.$C$1];[.F121];[$JSON.$D$1];[.$G121];[$JSON.$E$1];IF(ISNA([.$T121]);&quot;null&quot;;&quot;&quot;&quot;&quot;&amp;[.$T121]&amp;&quot;&quot;&quot;&quot;);[$JSON.$F$1];[.$V121];[$JSON.$G$1];IF(ISNA([.$X121]);&quot;null&quot;;&quot;&quot;&quot;&quot;&amp;[.$X121]&amp;&quot;&quot;&quot;&quot;);[$JSON.$H$1];[.$AA121];[$JSON.$I$1];[.$I121];[$JSON.$J$1];[.K121];[$JSON.$K$1];[.$M121];[$JSON.$L$1];[.$P121];[$JSON.$M$1];[.$O121];[$JSON.$N$1];[.$S121];[$JSON.$O$1];[.$U121];[$JSON.$P$1];IF(ISNA([.$W121]);&quot;null&quot;;[.$W121]);[$JSON.$Q$1];[.$Y121];[$JSON.$R$1];IF([.$Z121];&quot;true&quot;;&quot;false&quot;);[$JSON.$S$1];[.$A121];[$JSON.$T$1];[.$B121];[$JSON.$U$1])" office:value-type="string" office:string-value="{&quot;id&quot;:&quot;Y-1&quot;,&quot;name&quot;:&quot;諸葛亮&quot;,&quot;displayName&quot;:&quot;諸葛亮&quot;,&quot;kana&quot;:&quot;しょかつりょう&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rarity&quot;:4,&quot;type&quot;:1,&quot;level&quot;:6,&quot;color&quot;:8,&quot;term&quot;:0,&quot;trait&quot;:0,&quot;power&quot;:4000,&quot;legacy&quot;:6,&quot;anyNumCopies&quot;:false,&quot;orderTable&quot;:120,&quot;orderDeck&quot;:248}," calcext:value-type="string">
            <text:p>{"id":"Y-1","name":"諸葛亮","displayName":"諸葛亮","kana":"しょかつりょう","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rarity":4,"type":1,"level":6,"color":8,"term":0,"trait":0,"power":4000,"legacy":6,"anyNumCopies":false,"orderTable":120,"orderDeck":248},</text:p>
          </table:table-cell>
          <table:table-cell table:number-columns-repeated="16356"/>
        </table:table-row>
        <table:table-row table:style-name="ro2">
          <table:table-cell table:style-name="ce11" office:value-type="float" office:value="121" calcext:value-type="float">
            <text:p>121</text:p>
          </table:table-cell>
          <table:table-cell table:style-name="ce11" office:value-type="float" office:value="66" calcext:value-type="float">
            <text:p>66</text:p>
          </table:table-cell>
          <table:table-cell table:style-name="ce21" office:value-type="string" calcext:value-type="string">
            <text:p>Y-2</text:p>
          </table:table-cell>
          <table:table-cell table:style-name="ce21" office:value-type="float" office:value="2" calcext:value-type="float">
            <text:p>2</text:p>
          </table:table-cell>
          <table:table-cell table:style-name="ce11" office:value-type="string" calcext:value-type="string">
            <text:p>今川義元</text:p>
          </table:table-cell>
          <table:table-cell table:style-name="ce11" office:value-type="string" calcext:value-type="string">
            <text:p>今川義元 (スターター)</text:p>
          </table:table-cell>
          <table:table-cell table:style-name="ce11" office:value-type="string" calcext:value-type="string">
            <text:p>いまがわよしもと</text:p>
          </table:table-cell>
          <table:table-cell table:style-name="ce11" office:value-type="string" calcext:value-type="string">
            <text:p>三国の英傑デッキ</text:p>
          </table:table-cell>
          <table:table-cell table:style-name="ce11" table:formula="of:=VLOOKUP([.H122];[$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2];[$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2];[$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2];[$能力語番号.$A$1:$能力語番号.$B$11];2;0);0)" office:value-type="float" office:value="0" calcext:value-type="float">
            <text:p>0</text:p>
          </table:table-cell>
          <table:table-cell office:value-type="string" calcext:value-type="string">
            <text:p>剣術</text:p>
          </table:table-cell>
          <table:table-cell table:style-name="ce11" table:formula="of:=IFERROR(VLOOKUP([.$T122];[$特性番号.$A$1:$特性番号.$B$8];2;0);0)" office:value-type="float" office:value="1" calcext:value-type="float">
            <text:p>1</text:p>
          </table:table-cell>
          <table:table-cell table:style-name="ce11" office:value-type="string" calcext:value-type="string">
            <text:p>ウォッチャー¶破壊されたとき、戦場のハイケイ1つを指定して発動できる。そのハイケイを破壊する。¶アタック+5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2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2.png</text:p>
          </table:table-cell>
          <table:table-cell table:style-name="ce11" table:formula="of:=CONCATENATE([$JSON.$A$1];[.$C122];[$JSON.$B$1];[.$E122];[$JSON.$C$1];[.F122];[$JSON.$D$1];[.$G122];[$JSON.$E$1];IF(ISNA([.$T122]);&quot;null&quot;;&quot;&quot;&quot;&quot;&amp;[.$T122]&amp;&quot;&quot;&quot;&quot;);[$JSON.$F$1];[.$V122];[$JSON.$G$1];IF(ISNA([.$X122]);&quot;null&quot;;&quot;&quot;&quot;&quot;&amp;[.$X122]&amp;&quot;&quot;&quot;&quot;);[$JSON.$H$1];[.$AA122];[$JSON.$I$1];[.$I122];[$JSON.$J$1];[.K122];[$JSON.$K$1];[.$M122];[$JSON.$L$1];[.$P122];[$JSON.$M$1];[.$O122];[$JSON.$N$1];[.$S122];[$JSON.$O$1];[.$U122];[$JSON.$P$1];IF(ISNA([.$W122]);&quot;null&quot;;[.$W122]);[$JSON.$Q$1];[.$Y122];[$JSON.$R$1];IF([.$Z122];&quot;true&quot;;&quot;false&quot;);[$JSON.$S$1];[.$A122];[$JSON.$T$1];[.$B122];[$JSON.$U$1])" office:value-type="string" office:string-value="{&quot;id&quot;:&quot;Y-2&quot;,&quot;name&quot;:&quot;今川義元&quot;,&quot;displayName&quot;:&quot;今川義元 (スターター)&quot;,&quot;kana&quot;:&quot;いまがわよしもと&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rarity&quot;:1,&quot;type&quot;:1,&quot;level&quot;:2,&quot;color&quot;:8,&quot;term&quot;:0,&quot;trait&quot;:1,&quot;power&quot;:1000,&quot;legacy&quot;:4,&quot;anyNumCopies&quot;:false,&quot;orderTable&quot;:121,&quot;orderDeck&quot;:66}," calcext:value-type="string">
            <text:p>{"id":"Y-2","name":"今川義元","displayName":"今川義元 (スターター)","kana":"いまがわよしもと","traitText":"剣術","ruleText":"ウォッチャー¶破壊されたとき、戦場のハイケイ1つを指定して発動できる。そのハイケイを破壊する。¶アタック+500","legacyText":"1ドローする","imageUrl":"https://one-draw.jp/ijinden/cardlist/Y01/card/02_Y_002.png","expansion":20,"rarity":1,"type":1,"level":2,"color":8,"term":0,"trait":1,"power":1000,"legacy":4,"anyNumCopies":false,"orderTable":121,"orderDeck":66},</text:p>
          </table:table-cell>
          <table:table-cell table:number-columns-repeated="16356"/>
        </table:table-row>
        <table:table-row table:style-name="ro2">
          <table:table-cell table:style-name="ce11" office:value-type="float" office:value="122" calcext:value-type="float">
            <text:p>122</text:p>
          </table:table-cell>
          <table:table-cell table:style-name="ce11" office:value-type="float" office:value="166" calcext:value-type="float">
            <text:p>166</text:p>
          </table:table-cell>
          <table:table-cell table:style-name="ce21" office:value-type="string" calcext:value-type="string">
            <text:p>Y-3</text:p>
          </table:table-cell>
          <table:table-cell table:style-name="ce21" office:value-type="float" office:value="3" calcext:value-type="float">
            <text:p>3</text:p>
          </table:table-cell>
          <table:table-cell table:style-name="ce11" office:value-type="string" calcext:value-type="string">
            <text:p>周瑜</text:p>
          </table:table-cell>
          <table:table-cell table:style-name="ce11" table:formula="of:=[.E123]" office:value-type="string" office:string-value="周瑜" calcext:value-type="string">
            <text:p>周瑜</text:p>
          </table:table-cell>
          <table:table-cell table:style-name="ce11" office:value-type="string" calcext:value-type="string">
            <text:p>しゅうゆ</text:p>
          </table:table-cell>
          <table:table-cell table:style-name="ce11" office:value-type="string" calcext:value-type="string">
            <text:p>三国の英傑デッキ</text:p>
          </table:table-cell>
          <table:table-cell table:style-name="ce11" table:formula="of:=VLOOKUP([.H123];[$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2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3];[$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3];[$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23];[$特性番号.$A$1:$特性番号.$B$8];2;0);0)" office:value-type="float" office:value="0" calcext:value-type="float">
            <text:p>0</text:p>
          </table:table-cell>
          <table:table-cell table:style-name="ce11" office:value-type="string" calcext:value-type="string">
            <text:p>カードが相手の墓地に5枚以下しかない間「ウォッチャー」を得る。¶自分の戦場の「即応」を持つイジン1体につき「アタック+1000」を得る。</text:p>
          </table:table-cell>
          <table:table-cell table:style-name="ce11" office:value-type="float" office:value="3500" calcext:value-type="float">
            <text:p>3500</text:p>
          </table:table-cell>
          <table:table-cell table:style-name="ce25" office:value-type="string" calcext:value-type="string">
            <text:p>魔力化</text:p>
          </table:table-cell>
          <table:table-cell table:style-name="ce11" table:formula="of:=IFERROR(VLOOKUP([.$X12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3.png</text:p>
          </table:table-cell>
          <table:table-cell table:style-name="ce11" table:formula="of:=CONCATENATE([$JSON.$A$1];[.$C123];[$JSON.$B$1];[.$E123];[$JSON.$C$1];[.F123];[$JSON.$D$1];[.$G123];[$JSON.$E$1];IF(ISNA([.$T123]);&quot;null&quot;;&quot;&quot;&quot;&quot;&amp;[.$T123]&amp;&quot;&quot;&quot;&quot;);[$JSON.$F$1];[.$V123];[$JSON.$G$1];IF(ISNA([.$X123]);&quot;null&quot;;&quot;&quot;&quot;&quot;&amp;[.$X123]&amp;&quot;&quot;&quot;&quot;);[$JSON.$H$1];[.$AA123];[$JSON.$I$1];[.$I123];[$JSON.$J$1];[.K123];[$JSON.$K$1];[.$M123];[$JSON.$L$1];[.$P123];[$JSON.$M$1];[.$O123];[$JSON.$N$1];[.$S123];[$JSON.$O$1];[.$U123];[$JSON.$P$1];IF(ISNA([.$W123]);&quot;null&quot;;[.$W123]);[$JSON.$Q$1];[.$Y123];[$JSON.$R$1];IF([.$Z123];&quot;true&quot;;&quot;false&quot;);[$JSON.$S$1];[.$A123];[$JSON.$T$1];[.$B123];[$JSON.$U$1])" office:value-type="string" office:string-value="{&quot;id&quot;:&quot;Y-3&quot;,&quot;name&quot;:&quot;周瑜&quot;,&quot;displayName&quot;:&quot;周瑜&quot;,&quot;kana&quot;:&quot;しゅうゆ&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rarity&quot;:1,&quot;type&quot;:1,&quot;level&quot;:4,&quot;color&quot;:8,&quot;term&quot;:0,&quot;trait&quot;:0,&quot;power&quot;:3500,&quot;legacy&quot;:1,&quot;anyNumCopies&quot;:false,&quot;orderTable&quot;:122,&quot;orderDeck&quot;:166}," calcext:value-type="string">
            <text:p>{"id":"Y-3","name":"周瑜","displayName":"周瑜","kana":"しゅうゆ","traitText":null,"ruleText":"カードが相手の墓地に5枚以下しかない間「ウォッチャー」を得る。¶自分の戦場の「即応」を持つイジン1体につき「アタック+1000」を得る。","legacyText":"魔力化","imageUrl":"https://one-draw.jp/ijinden/cardlist/Y01/card/02_Y_003.png","expansion":20,"rarity":1,"type":1,"level":4,"color":8,"term":0,"trait":0,"power":3500,"legacy":1,"anyNumCopies":false,"orderTable":122,"orderDeck":166},</text:p>
          </table:table-cell>
          <table:table-cell table:number-columns-repeated="16356"/>
        </table:table-row>
        <table:table-row table:style-name="ro2">
          <table:table-cell table:style-name="ce11" office:value-type="float" office:value="123" calcext:value-type="float">
            <text:p>123</text:p>
          </table:table-cell>
          <table:table-cell table:style-name="ce11" office:value-type="float" office:value="214" calcext:value-type="float">
            <text:p>214</text:p>
          </table:table-cell>
          <table:table-cell table:style-name="ce21" office:value-type="string" calcext:value-type="string">
            <text:p>Y-4</text:p>
          </table:table-cell>
          <table:table-cell table:style-name="ce21" office:value-type="float" office:value="4" calcext:value-type="float">
            <text:p>4</text:p>
          </table:table-cell>
          <table:table-cell table:style-name="ce11" office:value-type="string" calcext:value-type="string">
            <text:p>孫権</text:p>
          </table:table-cell>
          <table:table-cell table:style-name="ce11" table:formula="of:=[.E124]" office:value-type="string" office:string-value="孫権" calcext:value-type="string">
            <text:p>孫権</text:p>
          </table:table-cell>
          <table:table-cell table:style-name="ce11" office:value-type="string" calcext:value-type="string">
            <text:p>そんけん</text:p>
          </table:table-cell>
          <table:table-cell table:style-name="ce11" office:value-type="string" calcext:value-type="string">
            <text:p>三国の英傑デッキ</text:p>
          </table:table-cell>
          <table:table-cell table:style-name="ce11" table:formula="of:=VLOOKUP([.H124];[$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2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4];[$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4];[$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24];[$特性番号.$A$1:$特性番号.$B$8];2;0);0)" office:value-type="float" office:value="0" calcext:value-type="float">
            <text:p>0</text:p>
          </table:table-cell>
          <table:table-cell table:style-name="ce11" office:value-type="string" calcext:value-type="string">
            <text:p>即応¶ウォッチャー¶自分の戦場の赤のイジンが寝るたびに発動できる。自分の手札1枚を墓地に置いて、1ドローする。</text:p>
          </table:table-cell>
          <table:table-cell table:style-name="ce11" office:value-type="float" office:value="4500" calcext:value-type="float">
            <text:p>4500</text:p>
          </table:table-cell>
          <table:table-cell table:style-name="ce25" table:formula="of:=NA()" office:value-type="string" office:string-value="" calcext:value-type="error">
            <text:p>#N/A</text:p>
          </table:table-cell>
          <table:table-cell table:style-name="ce11" table:formula="of:=IFERROR(VLOOKUP([.$X12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4.png</text:p>
          </table:table-cell>
          <table:table-cell table:style-name="ce11" table:formula="of:=CONCATENATE([$JSON.$A$1];[.$C124];[$JSON.$B$1];[.$E124];[$JSON.$C$1];[.F124];[$JSON.$D$1];[.$G124];[$JSON.$E$1];IF(ISNA([.$T124]);&quot;null&quot;;&quot;&quot;&quot;&quot;&amp;[.$T124]&amp;&quot;&quot;&quot;&quot;);[$JSON.$F$1];[.$V124];[$JSON.$G$1];IF(ISNA([.$X124]);&quot;null&quot;;&quot;&quot;&quot;&quot;&amp;[.$X124]&amp;&quot;&quot;&quot;&quot;);[$JSON.$H$1];[.$AA124];[$JSON.$I$1];[.$I124];[$JSON.$J$1];[.K124];[$JSON.$K$1];[.$M124];[$JSON.$L$1];[.$P124];[$JSON.$M$1];[.$O124];[$JSON.$N$1];[.$S124];[$JSON.$O$1];[.$U124];[$JSON.$P$1];IF(ISNA([.$W124]);&quot;null&quot;;[.$W124]);[$JSON.$Q$1];[.$Y124];[$JSON.$R$1];IF([.$Z124];&quot;true&quot;;&quot;false&quot;);[$JSON.$S$1];[.$A124];[$JSON.$T$1];[.$B124];[$JSON.$U$1])" office:value-type="string" office:string-value="{&quot;id&quot;:&quot;Y-4&quot;,&quot;name&quot;:&quot;孫権&quot;,&quot;displayName&quot;:&quot;孫権&quot;,&quot;kana&quot;:&quot;そんけん&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rarity&quot;:1,&quot;type&quot;:1,&quot;level&quot;:5,&quot;color&quot;:8,&quot;term&quot;:0,&quot;trait&quot;:0,&quot;power&quot;:4500,&quot;legacy&quot;:0,&quot;anyNumCopies&quot;:false,&quot;orderTable&quot;:123,&quot;orderDeck&quot;:214}," calcext:value-type="string">
            <text:p>{"id":"Y-4","name":"孫権","displayName":"孫権","kana":"そんけん","traitText":null,"ruleText":"即応¶ウォッチャー¶自分の戦場の赤のイジンが寝るたびに発動できる。自分の手札1枚を墓地に置いて、1ドローする。","legacyText":null,"imageUrl":"https://one-draw.jp/ijinden/cardlist/Y01/card/02_Y_004.png","expansion":20,"rarity":1,"type":1,"level":5,"color":8,"term":0,"trait":0,"power":4500,"legacy":0,"anyNumCopies":false,"orderTable":123,"orderDeck":214},</text:p>
          </table:table-cell>
          <table:table-cell table:number-columns-repeated="16356"/>
        </table:table-row>
        <table:table-row table:style-name="ro2">
          <table:table-cell table:style-name="ce11" office:value-type="float" office:value="124" calcext:value-type="float">
            <text:p>124</text:p>
          </table:table-cell>
          <table:table-cell table:style-name="ce11" office:value-type="float" office:value="271" calcext:value-type="float">
            <text:p>271</text:p>
          </table:table-cell>
          <table:table-cell table:style-name="ce21" office:value-type="string" calcext:value-type="string">
            <text:p>Y-5</text:p>
          </table:table-cell>
          <table:table-cell table:style-name="ce21" office:value-type="float" office:value="5" calcext:value-type="float">
            <text:p>5</text:p>
          </table:table-cell>
          <table:table-cell table:style-name="ce11" office:value-type="string" calcext:value-type="string">
            <text:p>シャクシャイン</text:p>
          </table:table-cell>
          <table:table-cell table:style-name="ce11" table:formula="of:=[.E125]" office:value-type="string" office:string-value="シャクシャイン" calcext:value-type="string">
            <text:p>シャクシャイン</text:p>
          </table:table-cell>
          <table:table-cell table:style-name="ce11" office:value-type="string" calcext:value-type="string">
            <text:p>しゃくしゃいん</text:p>
          </table:table-cell>
          <table:table-cell table:style-name="ce11" office:value-type="string" calcext:value-type="string">
            <text:p>三国の英傑デッキ</text:p>
          </table:table-cell>
          <table:table-cell table:style-name="ce11" table:formula="of:=VLOOKUP([.H125];[$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2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5];[$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25];[$能力語番号.$A$1:$能力語番号.$B$11];2;0);0)" office:value-type="float" office:value="4" calcext:value-type="float">
            <text:p>4</text:p>
          </table:table-cell>
          <table:table-cell table:formula="of:=NA()" office:value-type="string" office:string-value="" calcext:value-type="error">
            <text:p>#N/A</text:p>
          </table:table-cell>
          <table:table-cell table:style-name="ce11" table:formula="of:=IFERROR(VLOOKUP([.$T125];[$特性番号.$A$1:$特性番号.$B$8];2;0);0)" office:value-type="float" office:value="0" calcext:value-type="float">
            <text:p>0</text:p>
          </table:table-cell>
          <table:table-cell table:style-name="ce11"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2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5.png</text:p>
          </table:table-cell>
          <table:table-cell table:style-name="ce11" table:formula="of:=CONCATENATE([$JSON.$A$1];[.$C125];[$JSON.$B$1];[.$E125];[$JSON.$C$1];[.F125];[$JSON.$D$1];[.$G125];[$JSON.$E$1];IF(ISNA([.$T125]);&quot;null&quot;;&quot;&quot;&quot;&quot;&amp;[.$T125]&amp;&quot;&quot;&quot;&quot;);[$JSON.$F$1];[.$V125];[$JSON.$G$1];IF(ISNA([.$X125]);&quot;null&quot;;&quot;&quot;&quot;&quot;&amp;[.$X125]&amp;&quot;&quot;&quot;&quot;);[$JSON.$H$1];[.$AA125];[$JSON.$I$1];[.$I125];[$JSON.$J$1];[.K125];[$JSON.$K$1];[.$M125];[$JSON.$L$1];[.$P125];[$JSON.$M$1];[.$O125];[$JSON.$N$1];[.$S125];[$JSON.$O$1];[.$U125];[$JSON.$P$1];IF(ISNA([.$W125]);&quot;null&quot;;[.$W125]);[$JSON.$Q$1];[.$Y125];[$JSON.$R$1];IF([.$Z125];&quot;true&quot;;&quot;false&quot;);[$JSON.$S$1];[.$A125];[$JSON.$T$1];[.$B125];[$JSON.$U$1])" office:value-type="string" office:string-value="{&quot;id&quot;:&quot;Y-5&quot;,&quot;name&quot;:&quot;シャクシャイン&quot;,&quot;displayName&quot;:&quot;シャクシャイン&quot;,&quot;kana&quot;:&quot;しゃくしゃいん&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rarity&quot;:1,&quot;type&quot;:1,&quot;level&quot;:7,&quot;color&quot;:8,&quot;term&quot;:4,&quot;trait&quot;:0,&quot;power&quot;:5000,&quot;legacy&quot;:0,&quot;anyNumCopies&quot;:false,&quot;orderTable&quot;:124,&quot;orderDeck&quot;:271}," calcext:value-type="string">
            <text:p>{"id":"Y-5","name":"シャクシャイン","displayName":"シャクシャイン","kana":"しゃくしゃいん","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rarity":1,"type":1,"level":7,"color":8,"term":4,"trait":0,"power":5000,"legacy":0,"anyNumCopies":false,"orderTable":124,"orderDeck":271},</text:p>
          </table:table-cell>
          <table:table-cell table:number-columns-repeated="16356"/>
        </table:table-row>
        <table:table-row table:style-name="ro2">
          <table:table-cell table:style-name="ce11" office:value-type="float" office:value="125" calcext:value-type="float">
            <text:p>125</text:p>
          </table:table-cell>
          <table:table-cell table:style-name="ce11" office:value-type="float" office:value="249" calcext:value-type="float">
            <text:p>249</text:p>
          </table:table-cell>
          <table:table-cell table:style-name="ce21" office:value-type="string" calcext:value-type="string">
            <text:p>Y-6</text:p>
          </table:table-cell>
          <table:table-cell table:style-name="ce21" office:value-type="float" office:value="6" calcext:value-type="float">
            <text:p>6</text:p>
          </table:table-cell>
          <table:table-cell table:style-name="ce11" office:value-type="string" calcext:value-type="string">
            <text:p>フビライ・ハン</text:p>
          </table:table-cell>
          <table:table-cell table:style-name="ce11" office:value-type="string" calcext:value-type="string">
            <text:p>フビライ・ハン (スターター)</text:p>
          </table:table-cell>
          <table:table-cell table:style-name="ce11" office:value-type="string" calcext:value-type="string">
            <text:p>ふびらいはん</text:p>
          </table:table-cell>
          <table:table-cell table:style-name="ce11" office:value-type="string" calcext:value-type="string">
            <text:p>三国の英傑デッキ</text:p>
          </table:table-cell>
          <table:table-cell table:style-name="ce11" table:formula="of:=VLOOKUP([.H126];[$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2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6];[$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26];[$特性番号.$A$1:$特性番号.$B$8];2;0);0)" office:value-type="float" office:value="0" calcext:value-type="float">
            <text:p>0</text:p>
          </table:table-cell>
          <table:table-cell table:style-name="ce11" office:value-type="string" calcext:value-type="string">
            <text:p>ダブルプレッシャー¶戦場に置かれたとき、自分の魔力ゾーンの『ストーン』マリョク2つまでをガーディアンにして戦場に置く。</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2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6.png</text:p>
          </table:table-cell>
          <table:table-cell table:style-name="ce11" table:formula="of:=CONCATENATE([$JSON.$A$1];[.$C126];[$JSON.$B$1];[.$E126];[$JSON.$C$1];[.F126];[$JSON.$D$1];[.$G126];[$JSON.$E$1];IF(ISNA([.$T126]);&quot;null&quot;;&quot;&quot;&quot;&quot;&amp;[.$T126]&amp;&quot;&quot;&quot;&quot;);[$JSON.$F$1];[.$V126];[$JSON.$G$1];IF(ISNA([.$X126]);&quot;null&quot;;&quot;&quot;&quot;&quot;&amp;[.$X126]&amp;&quot;&quot;&quot;&quot;);[$JSON.$H$1];[.$AA126];[$JSON.$I$1];[.$I126];[$JSON.$J$1];[.K126];[$JSON.$K$1];[.$M126];[$JSON.$L$1];[.$P126];[$JSON.$M$1];[.$O126];[$JSON.$N$1];[.$S126];[$JSON.$O$1];[.$U126];[$JSON.$P$1];IF(ISNA([.$W126]);&quot;null&quot;;[.$W126]);[$JSON.$Q$1];[.$Y126];[$JSON.$R$1];IF([.$Z126];&quot;true&quot;;&quot;false&quot;);[$JSON.$S$1];[.$A126];[$JSON.$T$1];[.$B126];[$JSON.$U$1])" office:value-type="string" office:string-value="{&quot;id&quot;:&quot;Y-6&quot;,&quot;name&quot;:&quot;フビライ・ハン&quot;,&quot;displayName&quot;:&quot;フビライ・ハン (スターター)&quot;,&quot;kana&quot;:&quot;ふびらいはん&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rarity&quot;:1,&quot;type&quot;:1,&quot;level&quot;:6,&quot;color&quot;:8,&quot;term&quot;:0,&quot;trait&quot;:0,&quot;power&quot;:3000,&quot;legacy&quot;:0,&quot;anyNumCopies&quot;:false,&quot;orderTable&quot;:125,&quot;orderDeck&quot;:249}," calcext:value-type="string">
            <text:p>{"id":"Y-6","name":"フビライ・ハン","displayName":"フビライ・ハン (スターター)","kana":"ふびらいはん","traitText":null,"ruleText":"ダブルプレッシャー¶戦場に置かれたとき、自分の魔力ゾーンの『ストーン』マリョク2つまでをガーディアンにして戦場に置く。","legacyText":null,"imageUrl":"https://one-draw.jp/ijinden/cardlist/Y01/card/02_Y_006.png","expansion":20,"rarity":1,"type":1,"level":6,"color":8,"term":0,"trait":0,"power":3000,"legacy":0,"anyNumCopies":false,"orderTable":125,"orderDeck":249},</text:p>
          </table:table-cell>
          <table:table-cell table:number-columns-repeated="16356"/>
        </table:table-row>
        <table:table-row table:style-name="ro2">
          <table:table-cell table:style-name="ce11" office:value-type="float" office:value="126" calcext:value-type="float">
            <text:p>126</text:p>
          </table:table-cell>
          <table:table-cell table:style-name="ce11" office:value-type="float" office:value="67" calcext:value-type="float">
            <text:p>67</text:p>
          </table:table-cell>
          <table:table-cell table:style-name="ce21" office:value-type="string" calcext:value-type="string">
            <text:p>Y-7</text:p>
          </table:table-cell>
          <table:table-cell table:style-name="ce21" office:value-type="float" office:value="7" calcext:value-type="float">
            <text:p>7</text:p>
          </table:table-cell>
          <table:table-cell table:style-name="ce11" office:value-type="string" calcext:value-type="string">
            <text:p>足利義教</text:p>
          </table:table-cell>
          <table:table-cell table:style-name="ce11" table:formula="of:=[.E127]" office:value-type="string" office:string-value="足利義教" calcext:value-type="string">
            <text:p>足利義教</text:p>
          </table:table-cell>
          <table:table-cell table:style-name="ce11" office:value-type="string" calcext:value-type="string">
            <text:p>あしかがよしのり</text:p>
          </table:table-cell>
          <table:table-cell table:style-name="ce11" office:value-type="string" calcext:value-type="string">
            <text:p>三国の英傑デッキ</text:p>
          </table:table-cell>
          <table:table-cell table:style-name="ce11" table:formula="of:=VLOOKUP([.H127];[$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2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7];[$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27];[$特性番号.$A$1:$特性番号.$B$8];2;0);0)" office:value-type="float" office:value="0" calcext:value-type="float">
            <text:p>0</text:p>
          </table:table-cell>
          <table:table-cell table:style-name="ce11" office:value-type="string" calcext:value-type="string">
            <text:p>この能力はターンに1回しか発動しない。自分の墓地の「遺業能力」が発動したときに発動できる。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12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7.png</text:p>
          </table:table-cell>
          <table:table-cell table:style-name="ce11" table:formula="of:=CONCATENATE([$JSON.$A$1];[.$C127];[$JSON.$B$1];[.$E127];[$JSON.$C$1];[.F127];[$JSON.$D$1];[.$G127];[$JSON.$E$1];IF(ISNA([.$T127]);&quot;null&quot;;&quot;&quot;&quot;&quot;&amp;[.$T127]&amp;&quot;&quot;&quot;&quot;);[$JSON.$F$1];[.$V127];[$JSON.$G$1];IF(ISNA([.$X127]);&quot;null&quot;;&quot;&quot;&quot;&quot;&amp;[.$X127]&amp;&quot;&quot;&quot;&quot;);[$JSON.$H$1];[.$AA127];[$JSON.$I$1];[.$I127];[$JSON.$J$1];[.K127];[$JSON.$K$1];[.$M127];[$JSON.$L$1];[.$P127];[$JSON.$M$1];[.$O127];[$JSON.$N$1];[.$S127];[$JSON.$O$1];[.$U127];[$JSON.$P$1];IF(ISNA([.$W127]);&quot;null&quot;;[.$W127]);[$JSON.$Q$1];[.$Y127];[$JSON.$R$1];IF([.$Z127];&quot;true&quot;;&quot;false&quot;);[$JSON.$S$1];[.$A127];[$JSON.$T$1];[.$B127];[$JSON.$U$1])" office:value-type="string" office:string-value="{&quot;id&quot;:&quot;Y-7&quot;,&quot;name&quot;:&quot;足利義教&quot;,&quot;displayName&quot;:&quot;足利義教&quot;,&quot;kana&quot;:&quot;あしかがよしのり&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rarity&quot;:1,&quot;type&quot;:1,&quot;level&quot;:2,&quot;color&quot;:8,&quot;term&quot;:0,&quot;trait&quot;:0,&quot;power&quot;:2000,&quot;legacy&quot;:0,&quot;anyNumCopies&quot;:false,&quot;orderTable&quot;:126,&quot;orderDeck&quot;:67}," calcext:value-type="string">
            <text:p>{"id":"Y-7","name":"足利義教","displayName":"足利義教","kana":"あしかがよしのり","traitText":null,"ruleText":"この能力はターンに1回しか発動しない。自分の墓地の「遺業能力」が発動したときに発動できる。1ドローする。","legacyText":null,"imageUrl":"https://one-draw.jp/ijinden/cardlist/Y01/card/02_Y_007.png","expansion":20,"rarity":1,"type":1,"level":2,"color":8,"term":0,"trait":0,"power":2000,"legacy":0,"anyNumCopies":false,"orderTable":126,"orderDeck":67},</text:p>
          </table:table-cell>
          <table:table-cell table:number-columns-repeated="16356"/>
        </table:table-row>
        <table:table-row table:style-name="ro2">
          <table:table-cell table:style-name="ce11" office:value-type="float" office:value="127" calcext:value-type="float">
            <text:p>127</text:p>
          </table:table-cell>
          <table:table-cell table:style-name="ce11" office:value-type="float" office:value="19" calcext:value-type="float">
            <text:p>19</text:p>
          </table:table-cell>
          <table:table-cell table:style-name="ce21" office:value-type="string" calcext:value-type="string">
            <text:p>Y-8</text:p>
          </table:table-cell>
          <table:table-cell table:style-name="ce21" office:value-type="float" office:value="8" calcext:value-type="float">
            <text:p>8</text:p>
          </table:table-cell>
          <table:table-cell table:style-name="ce11" office:value-type="string" calcext:value-type="string">
            <text:p>ヴィジェ＝ルブラン</text:p>
          </table:table-cell>
          <table:table-cell table:style-name="ce11" table:formula="of:=[.E128]" office:value-type="string" office:string-value="ヴィジェ＝ルブラン" calcext:value-type="string">
            <text:p>ヴィジェ＝ルブラン</text:p>
          </table:table-cell>
          <table:table-cell table:style-name="ce11" office:value-type="string" calcext:value-type="string">
            <text:p>ゔぃじぇるぶらん</text:p>
          </table:table-cell>
          <table:table-cell table:style-name="ce11" office:value-type="string" calcext:value-type="string">
            <text:p>三国の英傑デッキ</text:p>
          </table:table-cell>
          <table:table-cell table:style-name="ce11" table:formula="of:=VLOOKUP([.H128];[$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2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2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28];[$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8];[$能力語番号.$A$1:$能力語番号.$B$11];2;0);0)" office:value-type="float" office:value="0" calcext:value-type="float">
            <text:p>0</text:p>
          </table:table-cell>
          <table:table-cell office:value-type="string" calcext:value-type="string">
            <text:p>美術</text:p>
          </table:table-cell>
          <table:table-cell table:style-name="ce11" table:formula="of:=IFERROR(VLOOKUP([.$T128];[$特性番号.$A$1:$特性番号.$B$8];2;0);0)" office:value-type="float" office:value="2" calcext:value-type="float">
            <text:p>2</text:p>
          </table:table-cell>
          <table:table-cell table:style-name="ce11" office:value-type="string" calcext:value-type="string">
            <text:p>戦場に置かれたとき、自分の戦場のガーディアン1体を墓地に置いて、自分の山札の上から1枚をガーディアンにして戦場に置く。</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2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8.png</text:p>
          </table:table-cell>
          <table:table-cell table:style-name="ce11" table:formula="of:=CONCATENATE([$JSON.$A$1];[.$C128];[$JSON.$B$1];[.$E128];[$JSON.$C$1];[.F128];[$JSON.$D$1];[.$G128];[$JSON.$E$1];IF(ISNA([.$T128]);&quot;null&quot;;&quot;&quot;&quot;&quot;&amp;[.$T128]&amp;&quot;&quot;&quot;&quot;);[$JSON.$F$1];[.$V128];[$JSON.$G$1];IF(ISNA([.$X128]);&quot;null&quot;;&quot;&quot;&quot;&quot;&amp;[.$X128]&amp;&quot;&quot;&quot;&quot;);[$JSON.$H$1];[.$AA128];[$JSON.$I$1];[.$I128];[$JSON.$J$1];[.K128];[$JSON.$K$1];[.$M128];[$JSON.$L$1];[.$P128];[$JSON.$M$1];[.$O128];[$JSON.$N$1];[.$S128];[$JSON.$O$1];[.$U128];[$JSON.$P$1];IF(ISNA([.$W128]);&quot;null&quot;;[.$W128]);[$JSON.$Q$1];[.$Y128];[$JSON.$R$1];IF([.$Z128];&quot;true&quot;;&quot;false&quot;);[$JSON.$S$1];[.$A128];[$JSON.$T$1];[.$B128];[$JSON.$U$1])" office:value-type="string" office:string-value="{&quot;id&quot;:&quot;Y-8&quot;,&quot;name&quot;:&quot;ヴィジェ＝ルブラン&quot;,&quot;displayName&quot;:&quot;ヴィジェ＝ルブラン&quot;,&quot;kana&quot;:&quot;ゔぃじぇるぶらん&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rarity&quot;:1,&quot;type&quot;:1,&quot;level&quot;:1,&quot;color&quot;:8,&quot;term&quot;:0,&quot;trait&quot;:2,&quot;power&quot;:500,&quot;legacy&quot;:4,&quot;anyNumCopies&quot;:false,&quot;orderTable&quot;:127,&quot;orderDeck&quot;:19}," calcext:value-type="string">
            <text:p>{"id":"Y-8","name":"ヴィジェ＝ルブラン","displayName":"ヴィジェ＝ルブラン","kana":"ゔぃじぇるぶらん","traitText":"美術","ruleText":"戦場に置かれたとき、自分の戦場のガーディアン1体を墓地に置いて、自分の山札の上から1枚をガーディアンにして戦場に置く。","legacyText":"1ドローする","imageUrl":"https://one-draw.jp/ijinden/cardlist/Y01/card/02_Y_008.png","expansion":20,"rarity":1,"type":1,"level":1,"color":8,"term":0,"trait":2,"power":500,"legacy":4,"anyNumCopies":false,"orderTable":127,"orderDeck":19},</text:p>
          </table:table-cell>
          <table:table-cell table:number-columns-repeated="16356"/>
        </table:table-row>
        <table:table-row table:style-name="ro2">
          <table:table-cell table:style-name="ce11" office:value-type="float" office:value="128" calcext:value-type="float">
            <text:p>128</text:p>
          </table:table-cell>
          <table:table-cell table:style-name="ce11" office:value-type="float" office:value="325" calcext:value-type="float">
            <text:p>325</text:p>
          </table:table-cell>
          <table:table-cell table:style-name="ce21" office:value-type="string" calcext:value-type="string">
            <text:p>Y-9</text:p>
          </table:table-cell>
          <table:table-cell table:style-name="ce21" office:value-type="float" office:value="9" calcext:value-type="float">
            <text:p>9</text:p>
          </table:table-cell>
          <table:table-cell table:style-name="ce11" office:value-type="string" calcext:value-type="string">
            <text:p>英傑集う大河</text:p>
          </table:table-cell>
          <table:table-cell table:style-name="ce11" table:formula="of:=[.E129]" office:value-type="string" office:string-value="英傑集う大河" calcext:value-type="string">
            <text:p>英傑集う大河</text:p>
          </table:table-cell>
          <table:table-cell table:style-name="ce11" office:value-type="string" calcext:value-type="string">
            <text:p>えいけつつどうたいが</text:p>
          </table:table-cell>
          <table:table-cell table:style-name="ce11" office:value-type="string" calcext:value-type="string">
            <text:p>三国の英傑デッキ</text:p>
          </table:table-cell>
          <table:table-cell table:style-name="ce11" table:formula="of:=VLOOKUP([.H129];[$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2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29];[$種類番号.$A$1:$種類番号.$B$4];2;0)" office:value-type="float" office:value="2" calcext:value-type="float">
            <text:p>2</text:p>
          </table:table-cell>
          <table:table-cell table:style-name="ce11" office:value-type="string" calcext:value-type="string">
            <text:p>黄</text:p>
          </table:table-cell>
          <table:table-cell table:style-name="ce11" table:formula="of:=VLOOKUP([.N12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2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29];[$特性番号.$A$1:$特性番号.$B$8];2;0);0)" office:value-type="float" office:value="0" calcext:value-type="float">
            <text:p>0</text:p>
          </table:table-cell>
          <table:table-cell table:style-name="ce11"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29];[$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09.png</text:p>
          </table:table-cell>
          <table:table-cell table:style-name="ce11" table:formula="of:=CONCATENATE([$JSON.$A$1];[.$C129];[$JSON.$B$1];[.$E129];[$JSON.$C$1];[.F129];[$JSON.$D$1];[.$G129];[$JSON.$E$1];IF(ISNA([.$T129]);&quot;null&quot;;&quot;&quot;&quot;&quot;&amp;[.$T129]&amp;&quot;&quot;&quot;&quot;);[$JSON.$F$1];[.$V129];[$JSON.$G$1];IF(ISNA([.$X129]);&quot;null&quot;;&quot;&quot;&quot;&quot;&amp;[.$X129]&amp;&quot;&quot;&quot;&quot;);[$JSON.$H$1];[.$AA129];[$JSON.$I$1];[.$I129];[$JSON.$J$1];[.K129];[$JSON.$K$1];[.$M129];[$JSON.$L$1];[.$P129];[$JSON.$M$1];[.$O129];[$JSON.$N$1];[.$S129];[$JSON.$O$1];[.$U129];[$JSON.$P$1];IF(ISNA([.$W129]);&quot;null&quot;;[.$W129]);[$JSON.$Q$1];[.$Y129];[$JSON.$R$1];IF([.$Z129];&quot;true&quot;;&quot;false&quot;);[$JSON.$S$1];[.$A129];[$JSON.$T$1];[.$B129];[$JSON.$U$1])" office:value-type="string" office:string-value="{&quot;id&quot;:&quot;Y-9&quot;,&quot;name&quot;:&quot;英傑集う大河&quot;,&quot;displayName&quot;:&quot;英傑集う大河&quot;,&quot;kana&quot;:&quot;えいけつつどうたいが&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rarity&quot;:1,&quot;type&quot;:2,&quot;level&quot;:3,&quot;color&quot;:8,&quot;term&quot;:0,&quot;trait&quot;:0,&quot;power&quot;:null,&quot;legacy&quot;:7,&quot;anyNumCopies&quot;:false,&quot;orderTable&quot;:128,&quot;orderDeck&quot;:325}," calcext:value-type="string">
            <text:p>{"id":"Y-9","name":"英傑集う大河","displayName":"英傑集う大河","kana":"えいけつつどうたいが","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rarity":1,"type":2,"level":3,"color":8,"term":0,"trait":0,"power":null,"legacy":7,"anyNumCopies":false,"orderTable":128,"orderDeck":325},</text:p>
          </table:table-cell>
          <table:table-cell table:number-columns-repeated="16356"/>
        </table:table-row>
        <table:table-row table:style-name="ro2">
          <table:table-cell table:style-name="ce11" office:value-type="float" office:value="129" calcext:value-type="float">
            <text:p>129</text:p>
          </table:table-cell>
          <table:table-cell table:style-name="ce11" office:value-type="float" office:value="312" calcext:value-type="float">
            <text:p>312</text:p>
          </table:table-cell>
          <table:table-cell table:style-name="ce21" office:value-type="string" calcext:value-type="string">
            <text:p>Y-10</text:p>
          </table:table-cell>
          <table:table-cell table:style-name="ce21" office:value-type="float" office:value="10" calcext:value-type="float">
            <text:p>10</text:p>
          </table:table-cell>
          <table:table-cell table:style-name="ce11" office:value-type="string" calcext:value-type="string">
            <text:p>地上の紫微垣</text:p>
          </table:table-cell>
          <table:table-cell table:style-name="ce11" office:value-type="string" calcext:value-type="string">
            <text:p>地上の紫微垣 (スターター)</text:p>
          </table:table-cell>
          <table:table-cell table:style-name="ce11" office:value-type="string" calcext:value-type="string">
            <text:p>ちじょうのしびえん</text:p>
          </table:table-cell>
          <table:table-cell table:style-name="ce11" office:value-type="string" calcext:value-type="string">
            <text:p>三国の英傑デッキ</text:p>
          </table:table-cell>
          <table:table-cell table:style-name="ce11" table:formula="of:=VLOOKUP([.H130];[$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3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30];[$種類番号.$A$1:$種類番号.$B$4];2;0)" office:value-type="float" office:value="2" calcext:value-type="float">
            <text:p>2</text:p>
          </table:table-cell>
          <table:table-cell table:style-name="ce11" office:value-type="string" calcext:value-type="string">
            <text:p>黄</text:p>
          </table:table-cell>
          <table:table-cell table:style-name="ce11" table:formula="of:=VLOOKUP([.N130];[$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30];[$特性番号.$A$1:$特性番号.$B$8];2;0);0)" office:value-type="float" office:value="0" calcext:value-type="float">
            <text:p>0</text:p>
          </table:table-cell>
          <table:table-cell table:style-name="ce11" office:value-type="string" calcext:value-type="string">
            <text:p>自分のマリョク配置に際し、表向きで置く限り、自分の墓地のマリョクも選べ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3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10.png</text:p>
          </table:table-cell>
          <table:table-cell table:style-name="ce11" table:formula="of:=CONCATENATE([$JSON.$A$1];[.$C130];[$JSON.$B$1];[.$E130];[$JSON.$C$1];[.F130];[$JSON.$D$1];[.$G130];[$JSON.$E$1];IF(ISNA([.$T130]);&quot;null&quot;;&quot;&quot;&quot;&quot;&amp;[.$T130]&amp;&quot;&quot;&quot;&quot;);[$JSON.$F$1];[.$V130];[$JSON.$G$1];IF(ISNA([.$X130]);&quot;null&quot;;&quot;&quot;&quot;&quot;&amp;[.$X130]&amp;&quot;&quot;&quot;&quot;);[$JSON.$H$1];[.$AA130];[$JSON.$I$1];[.$I130];[$JSON.$J$1];[.K130];[$JSON.$K$1];[.$M130];[$JSON.$L$1];[.$P130];[$JSON.$M$1];[.$O130];[$JSON.$N$1];[.$S130];[$JSON.$O$1];[.$U130];[$JSON.$P$1];IF(ISNA([.$W130]);&quot;null&quot;;[.$W130]);[$JSON.$Q$1];[.$Y130];[$JSON.$R$1];IF([.$Z130];&quot;true&quot;;&quot;false&quot;);[$JSON.$S$1];[.$A130];[$JSON.$T$1];[.$B130];[$JSON.$U$1])" office:value-type="string" office:string-value="{&quot;id&quot;:&quot;Y-10&quot;,&quot;name&quot;:&quot;地上の紫微垣&quot;,&quot;displayName&quot;:&quot;地上の紫微垣 (スターター)&quot;,&quot;kana&quot;:&quot;ちじょうのしびえん&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rarity&quot;:1,&quot;type&quot;:2,&quot;level&quot;:2,&quot;color&quot;:8,&quot;term&quot;:0,&quot;trait&quot;:0,&quot;power&quot;:null,&quot;legacy&quot;:7,&quot;anyNumCopies&quot;:false,&quot;orderTable&quot;:129,&quot;orderDeck&quot;:312}," calcext:value-type="string">
            <text:p>{"id":"Y-10","name":"地上の紫微垣","displayName":"地上の紫微垣 (スターター)","kana":"ちじょうのしびえん","traitText":null,"ruleText":"自分のマリョク配置に際し、表向きで置く限り、自分の墓地のマリョクも選べる。","legacyText":"山札の上か下に戻す","imageUrl":"https://one-draw.jp/ijinden/cardlist/Y01/card/02_Y_010.png","expansion":20,"rarity":1,"type":2,"level":2,"color":8,"term":0,"trait":0,"power":null,"legacy":7,"anyNumCopies":false,"orderTable":129,"orderDeck":312},</text:p>
          </table:table-cell>
          <table:table-cell table:number-columns-repeated="16356"/>
        </table:table-row>
        <table:table-row table:style-name="ro2">
          <table:table-cell table:style-name="ce11" office:value-type="float" office:value="130" calcext:value-type="float">
            <text:p>130</text:p>
          </table:table-cell>
          <table:table-cell table:style-name="ce11" office:value-type="float" office:value="380" calcext:value-type="float">
            <text:p>380</text:p>
          </table:table-cell>
          <table:table-cell table:style-name="ce21" office:value-type="string" calcext:value-type="string">
            <text:p>Y-11</text:p>
          </table:table-cell>
          <table:table-cell table:style-name="ce21" office:value-type="float" office:value="11" calcext:value-type="float">
            <text:p>11</text:p>
          </table:table-cell>
          <table:table-cell table:style-name="ce11" office:value-type="string" calcext:value-type="string">
            <text:p>ネハン</text:p>
          </table:table-cell>
          <table:table-cell table:style-name="ce11" table:formula="of:=[.E131]" office:value-type="string" office:string-value="ネハン" calcext:value-type="string">
            <text:p>ネハン</text:p>
          </table:table-cell>
          <table:table-cell table:style-name="ce11" office:value-type="string" calcext:value-type="string">
            <text:p>ねはん</text:p>
          </table:table-cell>
          <table:table-cell table:style-name="ce11" office:value-type="string" calcext:value-type="string">
            <text:p>三国の英傑デッキ</text:p>
          </table:table-cell>
          <table:table-cell table:style-name="ce11" table:formula="of:=VLOOKUP([.H131];[$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3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1];[$種類番号.$A$1:$種類番号.$B$4];2;0)" office:value-type="float" office:value="3" calcext:value-type="float">
            <text:p>3</text:p>
          </table:table-cell>
          <table:table-cell table:style-name="ce11" office:value-type="string" calcext:value-type="string">
            <text:p>黄</text:p>
          </table:table-cell>
          <table:table-cell table:style-name="ce11" table:formula="of:=VLOOKUP([.N131];[$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31];[$特性番号.$A$1:$特性番号.$B$8];2;0);0)" office:value-type="float" office:value="0" calcext:value-type="float">
            <text:p>0</text:p>
          </table:table-cell>
          <table:table-cell table:style-name="ce11" office:value-type="string" calcext:value-type="string">
            <text:p>戦場の寝ているカード1つを指定して発動できる。そのカードを山札の下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3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11.png</text:p>
          </table:table-cell>
          <table:table-cell table:style-name="ce11" table:formula="of:=CONCATENATE([$JSON.$A$1];[.$C131];[$JSON.$B$1];[.$E131];[$JSON.$C$1];[.F131];[$JSON.$D$1];[.$G131];[$JSON.$E$1];IF(ISNA([.$T131]);&quot;null&quot;;&quot;&quot;&quot;&quot;&amp;[.$T131]&amp;&quot;&quot;&quot;&quot;);[$JSON.$F$1];[.$V131];[$JSON.$G$1];IF(ISNA([.$X131]);&quot;null&quot;;&quot;&quot;&quot;&quot;&amp;[.$X131]&amp;&quot;&quot;&quot;&quot;);[$JSON.$H$1];[.$AA131];[$JSON.$I$1];[.$I131];[$JSON.$J$1];[.K131];[$JSON.$K$1];[.$M131];[$JSON.$L$1];[.$P131];[$JSON.$M$1];[.$O131];[$JSON.$N$1];[.$S131];[$JSON.$O$1];[.$U131];[$JSON.$P$1];IF(ISNA([.$W131]);&quot;null&quot;;[.$W131]);[$JSON.$Q$1];[.$Y131];[$JSON.$R$1];IF([.$Z131];&quot;true&quot;;&quot;false&quot;);[$JSON.$S$1];[.$A131];[$JSON.$T$1];[.$B131];[$JSON.$U$1])" office:value-type="string" office:string-value="{&quot;id&quot;:&quot;Y-11&quot;,&quot;name&quot;:&quot;ネハン&quot;,&quot;displayName&quot;:&quot;ネハン&quot;,&quot;kana&quot;:&quot;ねはん&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rarity&quot;:1,&quot;type&quot;:3,&quot;level&quot;:2,&quot;color&quot;:8,&quot;term&quot;:0,&quot;trait&quot;:0,&quot;power&quot;:null,&quot;legacy&quot;:2,&quot;anyNumCopies&quot;:false,&quot;orderTable&quot;:130,&quot;orderDeck&quot;:380}," calcext:value-type="string">
            <text:p>{"id":"Y-11","name":"ネハン","displayName":"ネハン","kana":"ねはん","traitText":null,"ruleText":"戦場の寝ているカード1つを指定して発動できる。そのカードを山札の下に戻す。","legacyText":"冥府発動","imageUrl":"https://one-draw.jp/ijinden/cardlist/Y01/card/02_Y_011.png","expansion":20,"rarity":1,"type":3,"level":2,"color":8,"term":0,"trait":0,"power":null,"legacy":2,"anyNumCopies":false,"orderTable":130,"orderDeck":380},</text:p>
          </table:table-cell>
          <table:table-cell table:number-columns-repeated="16356"/>
        </table:table-row>
        <table:table-row table:style-name="ro2">
          <table:table-cell table:style-name="ce11" office:value-type="float" office:value="131" calcext:value-type="float">
            <text:p>131</text:p>
          </table:table-cell>
          <table:table-cell table:style-name="ce11" office:value-type="float" office:value="364" calcext:value-type="float">
            <text:p>364</text:p>
          </table:table-cell>
          <table:table-cell table:style-name="ce21" office:value-type="string" calcext:value-type="string">
            <text:p>Y-12</text:p>
          </table:table-cell>
          <table:table-cell table:style-name="ce21" office:value-type="float" office:value="12" calcext:value-type="float">
            <text:p>12</text:p>
          </table:table-cell>
          <table:table-cell table:style-name="ce11" office:value-type="string" calcext:value-type="string">
            <text:p>レクイエム</text:p>
          </table:table-cell>
          <table:table-cell table:style-name="ce11" office:value-type="string" calcext:value-type="string">
            <text:p>レクイエム (スターター)</text:p>
          </table:table-cell>
          <table:table-cell table:style-name="ce11" office:value-type="string" calcext:value-type="string">
            <text:p>れくいえむ</text:p>
          </table:table-cell>
          <table:table-cell table:style-name="ce11" office:value-type="string" calcext:value-type="string">
            <text:p>三国の英傑デッキ</text:p>
          </table:table-cell>
          <table:table-cell table:style-name="ce11" table:formula="of:=VLOOKUP([.H132];[$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3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32];[$種類番号.$A$1:$種類番号.$B$4];2;0)" office:value-type="float" office:value="3" calcext:value-type="float">
            <text:p>3</text:p>
          </table:table-cell>
          <table:table-cell table:style-name="ce11" office:value-type="string" calcext:value-type="string">
            <text:p>黄</text:p>
          </table:table-cell>
          <table:table-cell table:style-name="ce11" table:formula="of:=VLOOKUP([.N132];[$色番号.$A$1:$色番号.$B$10];2;0)" office:value-type="float" office:value="8" calcext:value-type="float">
            <text:p>8</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3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32];[$特性番号.$A$1:$特性番号.$B$8];2;0);0)" office:value-type="float" office:value="0" calcext:value-type="float">
            <text:p>0</text:p>
          </table:table-cell>
          <table:table-cell table:style-name="ce11" office:value-type="string" calcext:value-type="string">
            <text:p>墓地のマリョクでないカード4つを指定して発動できる。それらのカードすべてを山札の下に戻して、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3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Y01/card/02_Y_012.png</text:p>
          </table:table-cell>
          <table:table-cell table:style-name="ce11" table:formula="of:=CONCATENATE([$JSON.$A$1];[.$C132];[$JSON.$B$1];[.$E132];[$JSON.$C$1];[.F132];[$JSON.$D$1];[.$G132];[$JSON.$E$1];IF(ISNA([.$T132]);&quot;null&quot;;&quot;&quot;&quot;&quot;&amp;[.$T132]&amp;&quot;&quot;&quot;&quot;);[$JSON.$F$1];[.$V132];[$JSON.$G$1];IF(ISNA([.$X132]);&quot;null&quot;;&quot;&quot;&quot;&quot;&amp;[.$X132]&amp;&quot;&quot;&quot;&quot;);[$JSON.$H$1];[.$AA132];[$JSON.$I$1];[.$I132];[$JSON.$J$1];[.K132];[$JSON.$K$1];[.$M132];[$JSON.$L$1];[.$P132];[$JSON.$M$1];[.$O132];[$JSON.$N$1];[.$S132];[$JSON.$O$1];[.$U132];[$JSON.$P$1];IF(ISNA([.$W132]);&quot;null&quot;;[.$W132]);[$JSON.$Q$1];[.$Y132];[$JSON.$R$1];IF([.$Z132];&quot;true&quot;;&quot;false&quot;);[$JSON.$S$1];[.$A132];[$JSON.$T$1];[.$B132];[$JSON.$U$1])" office:value-type="string" office:string-value="{&quot;id&quot;:&quot;Y-12&quot;,&quot;name&quot;:&quot;レクイエム&quot;,&quot;displayName&quot;:&quot;レクイエム (スターター)&quot;,&quot;kana&quot;:&quot;れくいえむ&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rarity&quot;:1,&quot;type&quot;:3,&quot;level&quot;:1,&quot;color&quot;:8,&quot;term&quot;:0,&quot;trait&quot;:0,&quot;power&quot;:null,&quot;legacy&quot;:5,&quot;anyNumCopies&quot;:false,&quot;orderTable&quot;:131,&quot;orderDeck&quot;:364}," calcext:value-type="string">
            <text:p>{"id":"Y-12","name":"レクイエム","displayName":"レクイエム (スターター)","kana":"れくいえむ","traitText":null,"ruleText":"墓地のマリョクでないカード4つを指定して発動できる。それらのカードすべてを山札の下に戻して、1ドローする。","legacyText":"手札に戻す","imageUrl":"https://one-draw.jp/ijinden/cardlist/Y01/card/02_Y_012.png","expansion":20,"rarity":1,"type":3,"level":1,"color":8,"term":0,"trait":0,"power":null,"legacy":5,"anyNumCopies":false,"orderTable":131,"orderDeck":364},</text:p>
          </table:table-cell>
          <table:table-cell table:number-columns-repeated="16356"/>
        </table:table-row>
        <table:table-row table:style-name="ro2">
          <table:table-cell table:style-name="ce11" office:value-type="float" office:value="132" calcext:value-type="float">
            <text:p>132</text:p>
          </table:table-cell>
          <table:table-cell table:style-name="ce11" office:value-type="float" office:value="456" calcext:value-type="float">
            <text:p>456</text:p>
          </table:table-cell>
          <table:table-cell table:style-name="ce21" office:value-type="string" calcext:value-type="string">
            <text:p>Y-13</text:p>
          </table:table-cell>
          <table:table-cell table:style-name="ce21" office:value-type="float" office:value="13" calcext:value-type="float">
            <text:p>13</text:p>
          </table:table-cell>
          <table:table-cell table:style-name="ce11" office:value-type="string" calcext:value-type="string">
            <text:p>イエローストーン</text:p>
          </table:table-cell>
          <table:table-cell table:style-name="ce11" office:value-type="string" calcext:value-type="string">
            <text:p>イエローストーン (スターター)</text:p>
          </table:table-cell>
          <table:table-cell table:style-name="ce11" office:value-type="string" calcext:value-type="string">
            <text:p>いえろーすとーん</text:p>
          </table:table-cell>
          <table:table-cell table:style-name="ce11" office:value-type="string" calcext:value-type="string">
            <text:p>三国の英傑デッキ</text:p>
          </table:table-cell>
          <table:table-cell table:style-name="ce11" table:formula="of:=VLOOKUP([.H133];[$収録番号.$A$1:$収録番号.$B$10];2;0)" office:value-type="float" office:value="20" calcext:value-type="float">
            <text:p>20</text:p>
          </table:table-cell>
          <table:table-cell table:style-name="ce11" office:value-type="string" calcext:value-type="string">
            <text:p>N</text:p>
          </table:table-cell>
          <table:table-cell table:style-name="ce11" table:formula="of:=VLOOKUP([.J13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133];[$種類番号.$A$1:$種類番号.$B$4];2;0)" office:value-type="float" office:value="4" calcext:value-type="float">
            <text:p>4</text:p>
          </table:table-cell>
          <table:table-cell table:style-name="ce11" office:value-type="string" calcext:value-type="string">
            <text:p>黄</text:p>
          </table:table-cell>
          <table:table-cell table:style-name="ce11" table:formula="of:=VLOOKUP([.N13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33];[$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133];[$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Y01/card/02_Y_013.png</text:p>
          </table:table-cell>
          <table:table-cell table:style-name="ce11" table:formula="of:=CONCATENATE([$JSON.$A$1];[.$C133];[$JSON.$B$1];[.$E133];[$JSON.$C$1];[.F133];[$JSON.$D$1];[.$G133];[$JSON.$E$1];IF(ISNA([.$T133]);&quot;null&quot;;&quot;&quot;&quot;&quot;&amp;[.$T133]&amp;&quot;&quot;&quot;&quot;);[$JSON.$F$1];[.$V133];[$JSON.$G$1];IF(ISNA([.$X133]);&quot;null&quot;;&quot;&quot;&quot;&quot;&amp;[.$X133]&amp;&quot;&quot;&quot;&quot;);[$JSON.$H$1];[.$AA133];[$JSON.$I$1];[.$I133];[$JSON.$J$1];[.K133];[$JSON.$K$1];[.$M133];[$JSON.$L$1];[.$P133];[$JSON.$M$1];[.$O133];[$JSON.$N$1];[.$S133];[$JSON.$O$1];[.$U133];[$JSON.$P$1];IF(ISNA([.$W133]);&quot;null&quot;;[.$W133]);[$JSON.$Q$1];[.$Y133];[$JSON.$R$1];IF([.$Z133];&quot;true&quot;;&quot;false&quot;);[$JSON.$S$1];[.$A133];[$JSON.$T$1];[.$B133];[$JSON.$U$1])" office:value-type="string" office:string-value="{&quot;id&quot;:&quot;Y-13&quot;,&quot;name&quot;:&quot;イエローストーン&quot;,&quot;displayName&quot;:&quot;イエローストーン (スターター)&quot;,&quot;kana&quot;:&quot;いえろーすとーん&quot;,&quot;traitText&quot;:null,&quot;ruleText&quot;:&quot;※デッキに何枚でも入れてよい。&quot;,&quot;legacyText&quot;:&quot;復元&quot;,&quot;imageUrl&quot;:&quot;https://one-draw.jp/ijinden/cardlist/Y01/card/02_Y_013.png&quot;,&quot;expansion&quot;:20,&quot;rarity&quot;:1,&quot;type&quot;:4,&quot;level&quot;:1,&quot;color&quot;:8,&quot;term&quot;:0,&quot;trait&quot;:0,&quot;power&quot;:null,&quot;legacy&quot;:3,&quot;anyNumCopies&quot;:true,&quot;orderTable&quot;:132,&quot;orderDeck&quot;:456}," calcext:value-type="string">
            <text:p>{"id":"Y-13","name":"イエローストーン","displayName":"イエローストーン (スターター)","kana":"いえろーすとーん","traitText":null,"ruleText":"※デッキに何枚でも入れてよい。","legacyText":"復元","imageUrl":"https://one-draw.jp/ijinden/cardlist/Y01/card/02_Y_013.png","expansion":20,"rarity":1,"type":4,"level":1,"color":8,"term":0,"trait":0,"power":null,"legacy":3,"anyNumCopies":true,"orderTable":132,"orderDeck":456},</text:p>
          </table:table-cell>
          <table:table-cell table:number-columns-repeated="16356"/>
        </table:table-row>
        <table:table-row table:style-name="ro2">
          <table:table-cell table:style-name="ce11" office:value-type="float" office:value="133" calcext:value-type="float">
            <text:p>133</text:p>
          </table:table-cell>
          <table:table-cell table:style-name="ce11" office:value-type="float" office:value="87" calcext:value-type="float">
            <text:p>87</text:p>
          </table:table-cell>
          <table:table-cell table:style-name="ce21" office:value-type="string" calcext:value-type="string">
            <text:p>2-1</text:p>
          </table:table-cell>
          <table:table-cell table:style-name="ce21" office:value-type="float" office:value="1" calcext:value-type="float">
            <text:p>1</text:p>
          </table:table-cell>
          <table:table-cell table:style-name="ce11" office:value-type="string" calcext:value-type="string">
            <text:p>天草四郎</text:p>
          </table:table-cell>
          <table:table-cell table:style-name="ce11" table:formula="of:=[.E134]" office:value-type="string" office:string-value="天草四郎" calcext:value-type="string">
            <text:p>天草四郎</text:p>
          </table:table-cell>
          <table:table-cell table:style-name="ce11" office:value-type="string" calcext:value-type="string">
            <text:p>あまくさしろう</text:p>
          </table:table-cell>
          <table:table-cell table:style-name="ce11" office:value-type="string" calcext:value-type="string">
            <text:p>第２弾ブースターパック</text:p>
          </table:table-cell>
          <table:table-cell table:style-name="ce11" table:formula="of:=VLOOKUP([.H134];[$収録番号.$A$1:$収録番号.$B$10];2;0)" office:value-type="float" office:value="25" calcext:value-type="float">
            <text:p>25</text:p>
          </table:table-cell>
          <table:table-cell table:style-name="ce11" office:value-type="string" calcext:value-type="string">
            <text:p>SR</text:p>
          </table:table-cell>
          <table:table-cell table:style-name="ce11" table:formula="of:=VLOOKUP([.J13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4];[$種類番号.$A$1:$種類番号.$B$4];2;0)" office:value-type="float" office:value="1" calcext:value-type="float">
            <text:p>1</text:p>
          </table:table-cell>
          <table:table-cell table:style-name="ce11" office:value-type="string" calcext:value-type="string">
            <text:p>赤</text:p>
          </table:table-cell>
          <table:table-cell table:style-name="ce11" table:formula="of:=VLOOKUP([.N134];[$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34];[$能力語番号.$A$1:$能力語番号.$B$11];2;0);0)" office:value-type="float" office:value="4" calcext:value-type="float">
            <text:p>4</text:p>
          </table:table-cell>
          <table:table-cell office:value-type="string" calcext:value-type="string">
            <text:p>剣術</text:p>
          </table:table-cell>
          <table:table-cell table:style-name="ce11" table:formula="of:=IFERROR(VLOOKUP([.$T134];[$特性番号.$A$1:$特性番号.$B$8];2;0);0)" office:value-type="float" office:value="1" calcext:value-type="float">
            <text:p>1</text:p>
          </table:table-cell>
          <table:table-cell table:style-name="ce11"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table:style-name="ce11" office:value-type="float" office:value="3000" calcext:value-type="float">
            <text:p>3000</text:p>
          </table:table-cell>
          <table:table-cell table:style-name="ce25" office:value-type="string" calcext:value-type="string">
            <text:p>反魂</text:p>
          </table:table-cell>
          <table:table-cell table:style-name="ce11" table:formula="of:=IFERROR(VLOOKUP([.$X13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1.png</text:p>
          </table:table-cell>
          <table:table-cell table:style-name="ce11" table:formula="of:=CONCATENATE([$JSON.$A$1];[.$C134];[$JSON.$B$1];[.$E134];[$JSON.$C$1];[.F134];[$JSON.$D$1];[.$G134];[$JSON.$E$1];IF(ISNA([.$T134]);&quot;null&quot;;&quot;&quot;&quot;&quot;&amp;[.$T134]&amp;&quot;&quot;&quot;&quot;);[$JSON.$F$1];[.$V134];[$JSON.$G$1];IF(ISNA([.$X134]);&quot;null&quot;;&quot;&quot;&quot;&quot;&amp;[.$X134]&amp;&quot;&quot;&quot;&quot;);[$JSON.$H$1];[.$AA134];[$JSON.$I$1];[.$I134];[$JSON.$J$1];[.K134];[$JSON.$K$1];[.$M134];[$JSON.$L$1];[.$P134];[$JSON.$M$1];[.$O134];[$JSON.$N$1];[.$S134];[$JSON.$O$1];[.$U134];[$JSON.$P$1];IF(ISNA([.$W134]);&quot;null&quot;;[.$W134]);[$JSON.$Q$1];[.$Y134];[$JSON.$R$1];IF([.$Z134];&quot;true&quot;;&quot;false&quot;);[$JSON.$S$1];[.$A134];[$JSON.$T$1];[.$B134];[$JSON.$U$1])" office:value-type="string" office:string-value="{&quot;id&quot;:&quot;2-1&quot;,&quot;name&quot;:&quot;天草四郎&quot;,&quot;displayName&quot;:&quot;天草四郎&quot;,&quot;kana&quot;:&quot;あまくさしろう&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rarity&quot;:4,&quot;type&quot;:1,&quot;level&quot;:3,&quot;color&quot;:1,&quot;term&quot;:4,&quot;trait&quot;:1,&quot;power&quot;:3000,&quot;legacy&quot;:6,&quot;anyNumCopies&quot;:false,&quot;orderTable&quot;:133,&quot;orderDeck&quot;:87}," calcext:value-type="string">
            <text:p>{"id":"2-1","name":"天草四郎","displayName":"天草四郎","kana":"あまくさしろう","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rarity":4,"type":1,"level":3,"color":1,"term":4,"trait":1,"power":3000,"legacy":6,"anyNumCopies":false,"orderTable":133,"orderDeck":87},</text:p>
          </table:table-cell>
          <table:table-cell table:number-columns-repeated="16356"/>
        </table:table-row>
        <table:table-row table:style-name="ro2">
          <table:table-cell table:style-name="ce11" office:value-type="float" office:value="134" calcext:value-type="float">
            <text:p>134</text:p>
          </table:table-cell>
          <table:table-cell table:style-name="ce11" office:value-type="float" office:value="199" calcext:value-type="float">
            <text:p>199</text:p>
          </table:table-cell>
          <table:table-cell table:style-name="ce21" office:value-type="string" calcext:value-type="string">
            <text:p>2-2</text:p>
          </table:table-cell>
          <table:table-cell table:style-name="ce21" office:value-type="float" office:value="2" calcext:value-type="float">
            <text:p>2</text:p>
          </table:table-cell>
          <table:table-cell table:style-name="ce11" office:value-type="string" calcext:value-type="string">
            <text:p>ピョートル大帝</text:p>
          </table:table-cell>
          <table:table-cell table:style-name="ce11" table:formula="of:=[.E135]" office:value-type="string" office:string-value="ピョートル大帝" calcext:value-type="string">
            <text:p>ピョートル大帝</text:p>
          </table:table-cell>
          <table:table-cell table:style-name="ce11" office:value-type="string" calcext:value-type="string">
            <text:p>ぴょーとるたいてい</text:p>
          </table:table-cell>
          <table:table-cell table:style-name="ce11" office:value-type="string" calcext:value-type="string">
            <text:p>第２弾ブースターパック</text:p>
          </table:table-cell>
          <table:table-cell table:style-name="ce11" table:formula="of:=VLOOKUP([.H135];[$収録番号.$A$1:$収録番号.$B$10];2;0)" office:value-type="float" office:value="25" calcext:value-type="float">
            <text:p>25</text:p>
          </table:table-cell>
          <table:table-cell table:style-name="ce11" office:value-type="string" calcext:value-type="string">
            <text:p>SR</text:p>
          </table:table-cell>
          <table:table-cell table:style-name="ce11" table:formula="of:=VLOOKUP([.J13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35];[$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35];[$能力語番号.$A$1:$能力語番号.$B$11];2;0);0)" office:value-type="float" office:value="8" calcext:value-type="float">
            <text:p>8</text:p>
          </table:table-cell>
          <table:table-cell table:formula="of:=NA()" office:value-type="string" office:string-value="" calcext:value-type="error">
            <text:p>#N/A</text:p>
          </table:table-cell>
          <table:table-cell table:style-name="ce11" table:formula="of:=IFERROR(VLOOKUP([.$T135];[$特性番号.$A$1:$特性番号.$B$8];2;0);0)" office:value-type="float" office:value="0" calcext:value-type="float">
            <text:p>0</text:p>
          </table:table-cell>
          <table:table-cell table:style-name="ce11"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13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2.png</text:p>
          </table:table-cell>
          <table:table-cell table:style-name="ce11" table:formula="of:=CONCATENATE([$JSON.$A$1];[.$C135];[$JSON.$B$1];[.$E135];[$JSON.$C$1];[.F135];[$JSON.$D$1];[.$G135];[$JSON.$E$1];IF(ISNA([.$T135]);&quot;null&quot;;&quot;&quot;&quot;&quot;&amp;[.$T135]&amp;&quot;&quot;&quot;&quot;);[$JSON.$F$1];[.$V135];[$JSON.$G$1];IF(ISNA([.$X135]);&quot;null&quot;;&quot;&quot;&quot;&quot;&amp;[.$X135]&amp;&quot;&quot;&quot;&quot;);[$JSON.$H$1];[.$AA135];[$JSON.$I$1];[.$I135];[$JSON.$J$1];[.K135];[$JSON.$K$1];[.$M135];[$JSON.$L$1];[.$P135];[$JSON.$M$1];[.$O135];[$JSON.$N$1];[.$S135];[$JSON.$O$1];[.$U135];[$JSON.$P$1];IF(ISNA([.$W135]);&quot;null&quot;;[.$W135]);[$JSON.$Q$1];[.$Y135];[$JSON.$R$1];IF([.$Z135];&quot;true&quot;;&quot;false&quot;);[$JSON.$S$1];[.$A135];[$JSON.$T$1];[.$B135];[$JSON.$U$1])" office:value-type="string" office:string-value="{&quot;id&quot;:&quot;2-2&quot;,&quot;name&quot;:&quot;ピョートル大帝&quot;,&quot;displayName&quot;:&quot;ピョートル大帝&quot;,&quot;kana&quot;:&quot;ぴょーとるたいてい&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rarity&quot;:4,&quot;type&quot;:1,&quot;level&quot;:5,&quot;color&quot;:2,&quot;term&quot;:8,&quot;trait&quot;:0,&quot;power&quot;:4000,&quot;legacy&quot;:0,&quot;anyNumCopies&quot;:false,&quot;orderTable&quot;:134,&quot;orderDeck&quot;:199}," calcext:value-type="string">
            <text:p>{"id":"2-2","name":"ピョートル大帝","displayName":"ピョートル大帝","kana":"ぴょーとるたいてい","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rarity":4,"type":1,"level":5,"color":2,"term":8,"trait":0,"power":4000,"legacy":0,"anyNumCopies":false,"orderTable":134,"orderDeck":199},</text:p>
          </table:table-cell>
          <table:table-cell table:number-columns-repeated="16356"/>
        </table:table-row>
        <table:table-row table:style-name="ro2">
          <table:table-cell table:style-name="ce11" office:value-type="float" office:value="135" calcext:value-type="float">
            <text:p>135</text:p>
          </table:table-cell>
          <table:table-cell table:style-name="ce11" office:value-type="float" office:value="291" calcext:value-type="float">
            <text:p>291</text:p>
          </table:table-cell>
          <table:table-cell table:style-name="ce21" office:value-type="string" calcext:value-type="string">
            <text:p>2-3</text:p>
          </table:table-cell>
          <table:table-cell table:style-name="ce21" office:value-type="float" office:value="3" calcext:value-type="float">
            <text:p>3</text:p>
          </table:table-cell>
          <table:table-cell table:style-name="ce11" office:value-type="string" calcext:value-type="string">
            <text:p>エイブラハム・リンカン</text:p>
          </table:table-cell>
          <table:table-cell table:style-name="ce11" table:formula="of:=[.E136]" office:value-type="string" office:string-value="エイブラハム・リンカン" calcext:value-type="string">
            <text:p>エイブラハム・リンカン</text:p>
          </table:table-cell>
          <table:table-cell table:style-name="ce11" office:value-type="string" calcext:value-type="string">
            <text:p>えいぶらはむりんかん</text:p>
          </table:table-cell>
          <table:table-cell table:style-name="ce11" office:value-type="string" calcext:value-type="string">
            <text:p>第２弾ブースターパック</text:p>
          </table:table-cell>
          <table:table-cell table:style-name="ce11" table:formula="of:=VLOOKUP([.H136];[$収録番号.$A$1:$収録番号.$B$10];2;0)" office:value-type="float" office:value="25" calcext:value-type="float">
            <text:p>25</text:p>
          </table:table-cell>
          <table:table-cell table:style-name="ce11" office:value-type="string" calcext:value-type="string">
            <text:p>SR</text:p>
          </table:table-cell>
          <table:table-cell table:style-name="ce11" table:formula="of:=VLOOKUP([.J13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6];[$種類番号.$A$1:$種類番号.$B$4];2;0)" office:value-type="float" office:value="1" calcext:value-type="float">
            <text:p>1</text:p>
          </table:table-cell>
          <table:table-cell table:style-name="ce11" office:value-type="string" calcext:value-type="string">
            <text:p>緑</text:p>
          </table:table-cell>
          <table:table-cell table:style-name="ce11" table:formula="of:=VLOOKUP([.N136];[$色番号.$A$1:$色番号.$B$10];2;0)" office:value-type="float" office:value="4" calcext:value-type="float">
            <text:p>4</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36];[$特性番号.$A$1:$特性番号.$B$8];2;0);0)" office:value-type="float" office:value="0" calcext:value-type="float">
            <text:p>0</text:p>
          </table:table-cell>
          <table:table-cell table:style-name="ce11"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table:style-name="ce11" office:value-type="float" office:value="8000" calcext:value-type="float">
            <text:p>8000</text:p>
          </table:table-cell>
          <table:table-cell table:style-name="ce25" office:value-type="string" calcext:value-type="string">
            <text:p>魔力化</text:p>
          </table:table-cell>
          <table:table-cell table:style-name="ce11" table:formula="of:=IFERROR(VLOOKUP([.$X13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3.png</text:p>
          </table:table-cell>
          <table:table-cell table:style-name="ce11" table:formula="of:=CONCATENATE([$JSON.$A$1];[.$C136];[$JSON.$B$1];[.$E136];[$JSON.$C$1];[.F136];[$JSON.$D$1];[.$G136];[$JSON.$E$1];IF(ISNA([.$T136]);&quot;null&quot;;&quot;&quot;&quot;&quot;&amp;[.$T136]&amp;&quot;&quot;&quot;&quot;);[$JSON.$F$1];[.$V136];[$JSON.$G$1];IF(ISNA([.$X136]);&quot;null&quot;;&quot;&quot;&quot;&quot;&amp;[.$X136]&amp;&quot;&quot;&quot;&quot;);[$JSON.$H$1];[.$AA136];[$JSON.$I$1];[.$I136];[$JSON.$J$1];[.K136];[$JSON.$K$1];[.$M136];[$JSON.$L$1];[.$P136];[$JSON.$M$1];[.$O136];[$JSON.$N$1];[.$S136];[$JSON.$O$1];[.$U136];[$JSON.$P$1];IF(ISNA([.$W136]);&quot;null&quot;;[.$W136]);[$JSON.$Q$1];[.$Y136];[$JSON.$R$1];IF([.$Z136];&quot;true&quot;;&quot;false&quot;);[$JSON.$S$1];[.$A136];[$JSON.$T$1];[.$B136];[$JSON.$U$1])" office:value-type="string" office:string-value="{&quot;id&quot;:&quot;2-3&quot;,&quot;name&quot;:&quot;エイブラハム・リンカン&quot;,&quot;displayName&quot;:&quot;エイブラハム・リンカン&quot;,&quot;kana&quot;:&quot;えいぶらはむりんかん&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rarity&quot;:4,&quot;type&quot;:1,&quot;level&quot;:9,&quot;color&quot;:4,&quot;term&quot;:0,&quot;trait&quot;:0,&quot;power&quot;:8000,&quot;legacy&quot;:1,&quot;anyNumCopies&quot;:false,&quot;orderTable&quot;:135,&quot;orderDeck&quot;:291}," calcext:value-type="string">
            <text:p>{"id":"2-3","name":"エイブラハム・リンカン","displayName":"エイブラハム・リンカン","kana":"えいぶらはむりんかん","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rarity":4,"type":1,"level":9,"color":4,"term":0,"trait":0,"power":8000,"legacy":1,"anyNumCopies":false,"orderTable":135,"orderDeck":291},</text:p>
          </table:table-cell>
          <table:table-cell table:number-columns-repeated="16356"/>
        </table:table-row>
        <table:table-row table:style-name="ro2">
          <table:table-cell table:style-name="ce11" office:value-type="float" office:value="136" calcext:value-type="float">
            <text:p>136</text:p>
          </table:table-cell>
          <table:table-cell table:style-name="ce11" office:value-type="float" office:value="285" calcext:value-type="float">
            <text:p>285</text:p>
          </table:table-cell>
          <table:table-cell table:style-name="ce21" office:value-type="string" calcext:value-type="string">
            <text:p>2-4</text:p>
          </table:table-cell>
          <table:table-cell table:style-name="ce21" office:value-type="float" office:value="4" calcext:value-type="float">
            <text:p>4</text:p>
          </table:table-cell>
          <table:table-cell table:style-name="ce11" office:value-type="string" calcext:value-type="string">
            <text:p>アイザック・ニュートン</text:p>
          </table:table-cell>
          <table:table-cell table:style-name="ce11" table:formula="of:=[.E137]" office:value-type="string" office:string-value="アイザック・ニュートン" calcext:value-type="string">
            <text:p>アイザック・ニュートン</text:p>
          </table:table-cell>
          <table:table-cell table:style-name="ce11" office:value-type="string" calcext:value-type="string">
            <text:p>あいざっくにゅーとん</text:p>
          </table:table-cell>
          <table:table-cell table:style-name="ce11" office:value-type="string" calcext:value-type="string">
            <text:p>第２弾ブースターパック</text:p>
          </table:table-cell>
          <table:table-cell table:style-name="ce11" table:formula="of:=VLOOKUP([.H137];[$収録番号.$A$1:$収録番号.$B$10];2;0)" office:value-type="float" office:value="25" calcext:value-type="float">
            <text:p>25</text:p>
          </table:table-cell>
          <table:table-cell table:style-name="ce11" office:value-type="string" calcext:value-type="string">
            <text:p>SR</text:p>
          </table:table-cell>
          <table:table-cell table:style-name="ce11" table:formula="of:=VLOOKUP([.J13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7];[$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37];[$特性番号.$A$1:$特性番号.$B$8];2;0);0)" office:value-type="float" office:value="0" calcext:value-type="float">
            <text:p>0</text:p>
          </table:table-cell>
          <table:table-cell table:style-name="ce11"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13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4.png</text:p>
          </table:table-cell>
          <table:table-cell table:style-name="ce11" table:formula="of:=CONCATENATE([$JSON.$A$1];[.$C137];[$JSON.$B$1];[.$E137];[$JSON.$C$1];[.F137];[$JSON.$D$1];[.$G137];[$JSON.$E$1];IF(ISNA([.$T137]);&quot;null&quot;;&quot;&quot;&quot;&quot;&amp;[.$T137]&amp;&quot;&quot;&quot;&quot;);[$JSON.$F$1];[.$V137];[$JSON.$G$1];IF(ISNA([.$X137]);&quot;null&quot;;&quot;&quot;&quot;&quot;&amp;[.$X137]&amp;&quot;&quot;&quot;&quot;);[$JSON.$H$1];[.$AA137];[$JSON.$I$1];[.$I137];[$JSON.$J$1];[.K137];[$JSON.$K$1];[.$M137];[$JSON.$L$1];[.$P137];[$JSON.$M$1];[.$O137];[$JSON.$N$1];[.$S137];[$JSON.$O$1];[.$U137];[$JSON.$P$1];IF(ISNA([.$W137]);&quot;null&quot;;[.$W137]);[$JSON.$Q$1];[.$Y137];[$JSON.$R$1];IF([.$Z137];&quot;true&quot;;&quot;false&quot;);[$JSON.$S$1];[.$A137];[$JSON.$T$1];[.$B137];[$JSON.$U$1])" office:value-type="string" office:string-value="{&quot;id&quot;:&quot;2-4&quot;,&quot;name&quot;:&quot;アイザック・ニュートン&quot;,&quot;displayName&quot;:&quot;アイザック・ニュートン&quot;,&quot;kana&quot;:&quot;あいざっくにゅーとん&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rarity&quot;:4,&quot;type&quot;:1,&quot;level&quot;:8,&quot;color&quot;:8,&quot;term&quot;:0,&quot;trait&quot;:0,&quot;power&quot;:4000,&quot;legacy&quot;:1,&quot;anyNumCopies&quot;:false,&quot;orderTable&quot;:136,&quot;orderDeck&quot;:285}," calcext:value-type="string">
            <text:p>{"id":"2-4","name":"アイザック・ニュートン","displayName":"アイザック・ニュートン","kana":"あいざっくにゅーとん","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rarity":4,"type":1,"level":8,"color":8,"term":0,"trait":0,"power":4000,"legacy":1,"anyNumCopies":false,"orderTable":136,"orderDeck":285},</text:p>
          </table:table-cell>
          <table:table-cell table:number-columns-repeated="16356"/>
        </table:table-row>
        <table:table-row table:style-name="ro2">
          <table:table-cell table:style-name="ce11" office:value-type="float" office:value="137" calcext:value-type="float">
            <text:p>137</text:p>
          </table:table-cell>
          <table:table-cell table:style-name="ce11" office:value-type="float" office:value="167" calcext:value-type="float">
            <text:p>167</text:p>
          </table:table-cell>
          <table:table-cell table:style-name="ce21" office:value-type="string" calcext:value-type="string">
            <text:p>2-5</text:p>
          </table:table-cell>
          <table:table-cell table:style-name="ce21" office:value-type="float" office:value="5" calcext:value-type="float">
            <text:p>5</text:p>
          </table:table-cell>
          <table:table-cell table:style-name="ce11" office:value-type="string" calcext:value-type="string">
            <text:p>親鸞</text:p>
          </table:table-cell>
          <table:table-cell table:style-name="ce11" table:formula="of:=[.E138]" office:value-type="string" office:string-value="親鸞" calcext:value-type="string">
            <text:p>親鸞</text:p>
          </table:table-cell>
          <table:table-cell table:style-name="ce11" office:value-type="string" calcext:value-type="string">
            <text:p>しんらん</text:p>
          </table:table-cell>
          <table:table-cell table:style-name="ce11" office:value-type="string" calcext:value-type="string">
            <text:p>第２弾ブースターパック</text:p>
          </table:table-cell>
          <table:table-cell table:style-name="ce11" table:formula="of:=VLOOKUP([.H138];[$収録番号.$A$1:$収録番号.$B$10];2;0)" office:value-type="float" office:value="25" calcext:value-type="float">
            <text:p>25</text:p>
          </table:table-cell>
          <table:table-cell table:style-name="ce11" office:value-type="string" calcext:value-type="string">
            <text:p>SR</text:p>
          </table:table-cell>
          <table:table-cell table:style-name="ce11" table:formula="of:=VLOOKUP([.J13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8];[$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3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38];[$特性番号.$A$1:$特性番号.$B$8];2;0);0)" office:value-type="float" office:value="0" calcext:value-type="float">
            <text:p>0</text:p>
          </table:table-cell>
          <table:table-cell table:style-name="ce11"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table:style-name="ce11" office:value-type="float" office:value="2000" calcext:value-type="float">
            <text:p>2000</text:p>
          </table:table-cell>
          <table:table-cell table:style-name="ce25" office:value-type="string" calcext:value-type="string">
            <text:p>山札の上か下に戻す</text:p>
          </table:table-cell>
          <table:table-cell table:style-name="ce11" table:formula="of:=IFERROR(VLOOKUP([.$X13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5.png</text:p>
          </table:table-cell>
          <table:table-cell table:style-name="ce11" table:formula="of:=CONCATENATE([$JSON.$A$1];[.$C138];[$JSON.$B$1];[.$E138];[$JSON.$C$1];[.F138];[$JSON.$D$1];[.$G138];[$JSON.$E$1];IF(ISNA([.$T138]);&quot;null&quot;;&quot;&quot;&quot;&quot;&amp;[.$T138]&amp;&quot;&quot;&quot;&quot;);[$JSON.$F$1];[.$V138];[$JSON.$G$1];IF(ISNA([.$X138]);&quot;null&quot;;&quot;&quot;&quot;&quot;&amp;[.$X138]&amp;&quot;&quot;&quot;&quot;);[$JSON.$H$1];[.$AA138];[$JSON.$I$1];[.$I138];[$JSON.$J$1];[.K138];[$JSON.$K$1];[.$M138];[$JSON.$L$1];[.$P138];[$JSON.$M$1];[.$O138];[$JSON.$N$1];[.$S138];[$JSON.$O$1];[.$U138];[$JSON.$P$1];IF(ISNA([.$W138]);&quot;null&quot;;[.$W138]);[$JSON.$Q$1];[.$Y138];[$JSON.$R$1];IF([.$Z138];&quot;true&quot;;&quot;false&quot;);[$JSON.$S$1];[.$A138];[$JSON.$T$1];[.$B138];[$JSON.$U$1])" office:value-type="string" office:string-value="{&quot;id&quot;:&quot;2-5&quot;,&quot;name&quot;:&quot;親鸞&quot;,&quot;displayName&quot;:&quot;親鸞&quot;,&quot;kana&quot;:&quot;しんらん&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rarity&quot;:4,&quot;type&quot;:1,&quot;level&quot;:4,&quot;color&quot;:8,&quot;term&quot;:0,&quot;trait&quot;:0,&quot;power&quot;:2000,&quot;legacy&quot;:7,&quot;anyNumCopies&quot;:false,&quot;orderTable&quot;:137,&quot;orderDeck&quot;:167}," calcext:value-type="string">
            <text:p>{"id":"2-5","name":"親鸞","displayName":"親鸞","kana":"しんらん","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rarity":4,"type":1,"level":4,"color":8,"term":0,"trait":0,"power":2000,"legacy":7,"anyNumCopies":false,"orderTable":137,"orderDeck":167},</text:p>
          </table:table-cell>
          <table:table-cell table:number-columns-repeated="16356"/>
        </table:table-row>
        <table:table-row table:style-name="ro2">
          <table:table-cell table:style-name="ce11" office:value-type="float" office:value="138" calcext:value-type="float">
            <text:p>138</text:p>
          </table:table-cell>
          <table:table-cell table:style-name="ce11" office:value-type="float" office:value="272" calcext:value-type="float">
            <text:p>272</text:p>
          </table:table-cell>
          <table:table-cell table:style-name="ce21" office:value-type="string" calcext:value-type="string">
            <text:p>2-6</text:p>
          </table:table-cell>
          <table:table-cell table:style-name="ce21" office:value-type="float" office:value="6" calcext:value-type="float">
            <text:p>6</text:p>
          </table:table-cell>
          <table:table-cell table:style-name="ce11" office:value-type="string" calcext:value-type="string">
            <text:p>ナポレオン・ボナパルト</text:p>
          </table:table-cell>
          <table:table-cell table:style-name="ce11" table:formula="of:=[.E139]" office:value-type="string" office:string-value="ナポレオン・ボナパルト" calcext:value-type="string">
            <text:p>ナポレオン・ボナパルト</text:p>
          </table:table-cell>
          <table:table-cell table:style-name="ce11" office:value-type="string" calcext:value-type="string">
            <text:p>なぽれおんぼなぱると</text:p>
          </table:table-cell>
          <table:table-cell table:style-name="ce11" office:value-type="string" calcext:value-type="string">
            <text:p>第２弾ブースターパック</text:p>
          </table:table-cell>
          <table:table-cell table:style-name="ce11" table:formula="of:=VLOOKUP([.H139];[$収録番号.$A$1:$収録番号.$B$10];2;0)" office:value-type="float" office:value="25" calcext:value-type="float">
            <text:p>25</text:p>
          </table:table-cell>
          <table:table-cell table:style-name="ce11" office:value-type="string" calcext:value-type="string">
            <text:p>SR</text:p>
          </table:table-cell>
          <table:table-cell table:style-name="ce11" table:formula="of:=VLOOKUP([.J13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13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39];[$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39];[$能力語番号.$A$1:$能力語番号.$B$11];2;0);0)" office:value-type="float" office:value="8" calcext:value-type="float">
            <text:p>8</text:p>
          </table:table-cell>
          <table:table-cell table:formula="of:=NA()" office:value-type="string" office:string-value="" calcext:value-type="error">
            <text:p>#N/A</text:p>
          </table:table-cell>
          <table:table-cell table:style-name="ce11" table:formula="of:=IFERROR(VLOOKUP([.$T139];[$特性番号.$A$1:$特性番号.$B$8];2;0);0)" office:value-type="float" office:value="0" calcext:value-type="float">
            <text:p>0</text:p>
          </table:table-cell>
          <table:table-cell table:style-name="ce11"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3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6.png</text:p>
          </table:table-cell>
          <table:table-cell table:style-name="ce11" table:formula="of:=CONCATENATE([$JSON.$A$1];[.$C139];[$JSON.$B$1];[.$E139];[$JSON.$C$1];[.F139];[$JSON.$D$1];[.$G139];[$JSON.$E$1];IF(ISNA([.$T139]);&quot;null&quot;;&quot;&quot;&quot;&quot;&amp;[.$T139]&amp;&quot;&quot;&quot;&quot;);[$JSON.$F$1];[.$V139];[$JSON.$G$1];IF(ISNA([.$X139]);&quot;null&quot;;&quot;&quot;&quot;&quot;&amp;[.$X139]&amp;&quot;&quot;&quot;&quot;);[$JSON.$H$1];[.$AA139];[$JSON.$I$1];[.$I139];[$JSON.$J$1];[.K139];[$JSON.$K$1];[.$M139];[$JSON.$L$1];[.$P139];[$JSON.$M$1];[.$O139];[$JSON.$N$1];[.$S139];[$JSON.$O$1];[.$U139];[$JSON.$P$1];IF(ISNA([.$W139]);&quot;null&quot;;[.$W139]);[$JSON.$Q$1];[.$Y139];[$JSON.$R$1];IF([.$Z139];&quot;true&quot;;&quot;false&quot;);[$JSON.$S$1];[.$A139];[$JSON.$T$1];[.$B139];[$JSON.$U$1])" office:value-type="string" office:string-value="{&quot;id&quot;:&quot;2-6&quot;,&quot;name&quot;:&quot;ナポレオン・ボナパルト&quot;,&quot;displayName&quot;:&quot;ナポレオン・ボナパルト&quot;,&quot;kana&quot;:&quot;なぽれおんぼなぱると&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rarity&quot;:4,&quot;type&quot;:1,&quot;level&quot;:7,&quot;color&quot;:8,&quot;term&quot;:8,&quot;trait&quot;:0,&quot;power&quot;:5000,&quot;legacy&quot;:0,&quot;anyNumCopies&quot;:false,&quot;orderTable&quot;:138,&quot;orderDeck&quot;:272}," calcext:value-type="string">
            <text:p>{"id":"2-6","name":"ナポレオン・ボナパルト","displayName":"ナポレオン・ボナパルト","kana":"なぽれおんぼなぱると","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rarity":4,"type":1,"level":7,"color":8,"term":8,"trait":0,"power":5000,"legacy":0,"anyNumCopies":false,"orderTable":138,"orderDeck":272},</text:p>
          </table:table-cell>
          <table:table-cell table:number-columns-repeated="16356"/>
        </table:table-row>
        <table:table-row table:style-name="ro2">
          <table:table-cell table:style-name="ce11" office:value-type="float" office:value="139" calcext:value-type="float">
            <text:p>139</text:p>
          </table:table-cell>
          <table:table-cell table:style-name="ce11" office:value-type="float" office:value="35" calcext:value-type="float">
            <text:p>35</text:p>
          </table:table-cell>
          <table:table-cell table:style-name="ce21" office:value-type="string" calcext:value-type="string">
            <text:p>2-7</text:p>
          </table:table-cell>
          <table:table-cell table:style-name="ce21" office:value-type="float" office:value="7" calcext:value-type="float">
            <text:p>7</text:p>
          </table:table-cell>
          <table:table-cell table:style-name="ce11" office:value-type="string" calcext:value-type="string">
            <text:p>日野富子</text:p>
          </table:table-cell>
          <table:table-cell table:style-name="ce11" table:formula="of:=[.E140]" office:value-type="string" office:string-value="日野富子" calcext:value-type="string">
            <text:p>日野富子</text:p>
          </table:table-cell>
          <table:table-cell table:style-name="ce11" office:value-type="string" calcext:value-type="string">
            <text:p>ひのとみこ</text:p>
          </table:table-cell>
          <table:table-cell table:style-name="ce11" office:value-type="string" calcext:value-type="string">
            <text:p>第２弾ブースターパック</text:p>
          </table:table-cell>
          <table:table-cell table:style-name="ce11" table:formula="of:=VLOOKUP([.H140];[$収録番号.$A$1:$収録番号.$B$10];2;0)" office:value-type="float" office:value="25" calcext:value-type="float">
            <text:p>25</text:p>
          </table:table-cell>
          <table:table-cell table:style-name="ce11" office:value-type="string" calcext:value-type="string">
            <text:p>R</text:p>
          </table:table-cell>
          <table:table-cell table:style-name="ce11" table:formula="of:=VLOOKUP([.J14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40];[$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0];[$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40];[$特性番号.$A$1:$特性番号.$B$8];2;0);0)" office:value-type="float" office:value="0" calcext:value-type="float">
            <text:p>0</text:p>
          </table:table-cell>
          <table:table-cell table:style-name="ce11" office:value-type="string" calcext:value-type="string">
            <text:p>『ストーン』マリョクが自分の魔力ゾーンに置かれたときに発動できる。1ドローするか、自分の山札の上から1枚を裏のまま魔力ゾーンに置く。</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40];[$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7.png</text:p>
          </table:table-cell>
          <table:table-cell table:style-name="ce11" table:formula="of:=CONCATENATE([$JSON.$A$1];[.$C140];[$JSON.$B$1];[.$E140];[$JSON.$C$1];[.F140];[$JSON.$D$1];[.$G140];[$JSON.$E$1];IF(ISNA([.$T140]);&quot;null&quot;;&quot;&quot;&quot;&quot;&amp;[.$T140]&amp;&quot;&quot;&quot;&quot;);[$JSON.$F$1];[.$V140];[$JSON.$G$1];IF(ISNA([.$X140]);&quot;null&quot;;&quot;&quot;&quot;&quot;&amp;[.$X140]&amp;&quot;&quot;&quot;&quot;);[$JSON.$H$1];[.$AA140];[$JSON.$I$1];[.$I140];[$JSON.$J$1];[.K140];[$JSON.$K$1];[.$M140];[$JSON.$L$1];[.$P140];[$JSON.$M$1];[.$O140];[$JSON.$N$1];[.$S140];[$JSON.$O$1];[.$U140];[$JSON.$P$1];IF(ISNA([.$W140]);&quot;null&quot;;[.$W140]);[$JSON.$Q$1];[.$Y140];[$JSON.$R$1];IF([.$Z140];&quot;true&quot;;&quot;false&quot;);[$JSON.$S$1];[.$A140];[$JSON.$T$1];[.$B140];[$JSON.$U$1])" office:value-type="string" office:string-value="{&quot;id&quot;:&quot;2-7&quot;,&quot;name&quot;:&quot;日野富子&quot;,&quot;displayName&quot;:&quot;日野富子&quot;,&quot;kana&quot;:&quot;ひのとみこ&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rarity&quot;:2,&quot;type&quot;:1,&quot;level&quot;:2,&quot;color&quot;:1,&quot;term&quot;:0,&quot;trait&quot;:0,&quot;power&quot;:500,&quot;legacy&quot;:6,&quot;anyNumCopies&quot;:false,&quot;orderTable&quot;:139,&quot;orderDeck&quot;:35}," calcext:value-type="string">
            <text:p>{"id":"2-7","name":"日野富子","displayName":"日野富子","kana":"ひのとみこ","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rarity":2,"type":1,"level":2,"color":1,"term":0,"trait":0,"power":500,"legacy":6,"anyNumCopies":false,"orderTable":139,"orderDeck":35},</text:p>
          </table:table-cell>
          <table:table-cell table:number-columns-repeated="16356"/>
        </table:table-row>
        <table:table-row table:style-name="ro2">
          <table:table-cell table:style-name="ce11" office:value-type="float" office:value="140" calcext:value-type="float">
            <text:p>140</text:p>
          </table:table-cell>
          <table:table-cell table:style-name="ce11" office:value-type="float" office:value="296" calcext:value-type="float">
            <text:p>296</text:p>
          </table:table-cell>
          <table:table-cell table:style-name="ce21" office:value-type="string" calcext:value-type="string">
            <text:p>2-8</text:p>
          </table:table-cell>
          <table:table-cell table:style-name="ce21" office:value-type="float" office:value="8" calcext:value-type="float">
            <text:p>8</text:p>
          </table:table-cell>
          <table:table-cell table:style-name="ce11" office:value-type="string" calcext:value-type="string">
            <text:p>豊臣秀吉</text:p>
          </table:table-cell>
          <table:table-cell table:style-name="ce11" table:formula="of:=[.E141]" office:value-type="string" office:string-value="豊臣秀吉" calcext:value-type="string">
            <text:p>豊臣秀吉</text:p>
          </table:table-cell>
          <table:table-cell table:style-name="ce11" office:value-type="string" calcext:value-type="string">
            <text:p>とよとみひでよし</text:p>
          </table:table-cell>
          <table:table-cell table:style-name="ce11" office:value-type="string" calcext:value-type="string">
            <text:p>第２弾ブースターパック</text:p>
          </table:table-cell>
          <table:table-cell table:style-name="ce11" table:formula="of:=VLOOKUP([.H141];[$収録番号.$A$1:$収録番号.$B$10];2;0)" office:value-type="float" office:value="25" calcext:value-type="float">
            <text:p>25</text:p>
          </table:table-cell>
          <table:table-cell table:style-name="ce11" office:value-type="string" calcext:value-type="string">
            <text:p>R</text:p>
          </table:table-cell>
          <table:table-cell table:style-name="ce11" table:formula="of:=VLOOKUP([.J14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1];[$色番号.$A$1:$色番号.$B$10];2;0)" office:value-type="float" office:value="1" calcext:value-type="float">
            <text:p>1</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41];[$特性番号.$A$1:$特性番号.$B$8];2;0);0)" office:value-type="float" office:value="0" calcext:value-type="float">
            <text:p>0</text:p>
          </table:table-cell>
          <table:table-cell table:style-name="ce11"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table:style-name="ce11" office:value-type="float" office:value="10000" calcext:value-type="float">
            <text:p>10000</text:p>
          </table:table-cell>
          <table:table-cell table:style-name="ce25" table:formula="of:=NA()" office:value-type="string" office:string-value="" calcext:value-type="error">
            <text:p>#N/A</text:p>
          </table:table-cell>
          <table:table-cell table:style-name="ce11" table:formula="of:=IFERROR(VLOOKUP([.$X14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8.png</text:p>
          </table:table-cell>
          <table:table-cell table:style-name="ce11" table:formula="of:=CONCATENATE([$JSON.$A$1];[.$C141];[$JSON.$B$1];[.$E141];[$JSON.$C$1];[.F141];[$JSON.$D$1];[.$G141];[$JSON.$E$1];IF(ISNA([.$T141]);&quot;null&quot;;&quot;&quot;&quot;&quot;&amp;[.$T141]&amp;&quot;&quot;&quot;&quot;);[$JSON.$F$1];[.$V141];[$JSON.$G$1];IF(ISNA([.$X141]);&quot;null&quot;;&quot;&quot;&quot;&quot;&amp;[.$X141]&amp;&quot;&quot;&quot;&quot;);[$JSON.$H$1];[.$AA141];[$JSON.$I$1];[.$I141];[$JSON.$J$1];[.K141];[$JSON.$K$1];[.$M141];[$JSON.$L$1];[.$P141];[$JSON.$M$1];[.$O141];[$JSON.$N$1];[.$S141];[$JSON.$O$1];[.$U141];[$JSON.$P$1];IF(ISNA([.$W141]);&quot;null&quot;;[.$W141]);[$JSON.$Q$1];[.$Y141];[$JSON.$R$1];IF([.$Z141];&quot;true&quot;;&quot;false&quot;);[$JSON.$S$1];[.$A141];[$JSON.$T$1];[.$B141];[$JSON.$U$1])" office:value-type="string" office:string-value="{&quot;id&quot;:&quot;2-8&quot;,&quot;name&quot;:&quot;豊臣秀吉&quot;,&quot;displayName&quot;:&quot;豊臣秀吉&quot;,&quot;kana&quot;:&quot;とよとみひでよし&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rarity&quot;:2,&quot;type&quot;:1,&quot;level&quot;:10,&quot;color&quot;:1,&quot;term&quot;:0,&quot;trait&quot;:0,&quot;power&quot;:10000,&quot;legacy&quot;:0,&quot;anyNumCopies&quot;:false,&quot;orderTable&quot;:140,&quot;orderDeck&quot;:296}," calcext:value-type="string">
            <text:p>{"id":"2-8","name":"豊臣秀吉","displayName":"豊臣秀吉","kana":"とよとみひでよし","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rarity":2,"type":1,"level":10,"color":1,"term":0,"trait":0,"power":10000,"legacy":0,"anyNumCopies":false,"orderTable":140,"orderDeck":296},</text:p>
          </table:table-cell>
          <table:table-cell table:number-columns-repeated="16356"/>
        </table:table-row>
        <table:table-row table:style-name="ro2">
          <table:table-cell table:style-name="ce11" office:value-type="float" office:value="141" calcext:value-type="float">
            <text:p>141</text:p>
          </table:table-cell>
          <table:table-cell table:style-name="ce11" office:value-type="float" office:value="186" calcext:value-type="float">
            <text:p>186</text:p>
          </table:table-cell>
          <table:table-cell table:style-name="ce21" office:value-type="string" calcext:value-type="string">
            <text:p>2-9</text:p>
          </table:table-cell>
          <table:table-cell table:style-name="ce21" office:value-type="float" office:value="9" calcext:value-type="float">
            <text:p>9</text:p>
          </table:table-cell>
          <table:table-cell table:style-name="ce11" office:value-type="string" calcext:value-type="string">
            <text:p>石田三成</text:p>
          </table:table-cell>
          <table:table-cell table:style-name="ce11" table:formula="of:=[.E142]" office:value-type="string" office:string-value="石田三成" calcext:value-type="string">
            <text:p>石田三成</text:p>
          </table:table-cell>
          <table:table-cell table:style-name="ce11" office:value-type="string" calcext:value-type="string">
            <text:p>いしだみつなり</text:p>
          </table:table-cell>
          <table:table-cell table:style-name="ce11" office:value-type="string" calcext:value-type="string">
            <text:p>第２弾ブースターパック</text:p>
          </table:table-cell>
          <table:table-cell table:style-name="ce11" table:formula="of:=VLOOKUP([.H142];[$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2];[$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42];[$能力語番号.$A$1:$能力語番号.$B$11];2;0);0)" office:value-type="float" office:value="4" calcext:value-type="float">
            <text:p>4</text:p>
          </table:table-cell>
          <table:table-cell table:formula="of:=NA()" office:value-type="string" office:string-value="" calcext:value-type="error">
            <text:p>#N/A</text:p>
          </table:table-cell>
          <table:table-cell table:style-name="ce11" table:formula="of:=IFERROR(VLOOKUP([.$T142];[$特性番号.$A$1:$特性番号.$B$8];2;0);0)" office:value-type="float" office:value="0" calcext:value-type="float">
            <text:p>0</text:p>
          </table:table-cell>
          <table:table-cell table:style-name="ce11"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14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09.png</text:p>
          </table:table-cell>
          <table:table-cell table:style-name="ce11" table:formula="of:=CONCATENATE([$JSON.$A$1];[.$C142];[$JSON.$B$1];[.$E142];[$JSON.$C$1];[.F142];[$JSON.$D$1];[.$G142];[$JSON.$E$1];IF(ISNA([.$T142]);&quot;null&quot;;&quot;&quot;&quot;&quot;&amp;[.$T142]&amp;&quot;&quot;&quot;&quot;);[$JSON.$F$1];[.$V142];[$JSON.$G$1];IF(ISNA([.$X142]);&quot;null&quot;;&quot;&quot;&quot;&quot;&amp;[.$X142]&amp;&quot;&quot;&quot;&quot;);[$JSON.$H$1];[.$AA142];[$JSON.$I$1];[.$I142];[$JSON.$J$1];[.K142];[$JSON.$K$1];[.$M142];[$JSON.$L$1];[.$P142];[$JSON.$M$1];[.$O142];[$JSON.$N$1];[.$S142];[$JSON.$O$1];[.$U142];[$JSON.$P$1];IF(ISNA([.$W142]);&quot;null&quot;;[.$W142]);[$JSON.$Q$1];[.$Y142];[$JSON.$R$1];IF([.$Z142];&quot;true&quot;;&quot;false&quot;);[$JSON.$S$1];[.$A142];[$JSON.$T$1];[.$B142];[$JSON.$U$1])" office:value-type="string" office:string-value="{&quot;id&quot;:&quot;2-9&quot;,&quot;name&quot;:&quot;石田三成&quot;,&quot;displayName&quot;:&quot;石田三成&quot;,&quot;kana&quot;:&quot;いしだみつなり&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rarity&quot;:1,&quot;type&quot;:1,&quot;level&quot;:5,&quot;color&quot;:1,&quot;term&quot;:4,&quot;trait&quot;:0,&quot;power&quot;:3000,&quot;legacy&quot;:1,&quot;anyNumCopies&quot;:false,&quot;orderTable&quot;:141,&quot;orderDeck&quot;:186}," calcext:value-type="string">
            <text:p>{"id":"2-9","name":"石田三成","displayName":"石田三成","kana":"いしだみつなり","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rarity":1,"type":1,"level":5,"color":1,"term":4,"trait":0,"power":3000,"legacy":1,"anyNumCopies":false,"orderTable":141,"orderDeck":186},</text:p>
          </table:table-cell>
          <table:table-cell table:number-columns-repeated="16356"/>
        </table:table-row>
        <table:table-row table:style-name="ro2">
          <table:table-cell table:style-name="ce11" office:value-type="float" office:value="142" calcext:value-type="float">
            <text:p>142</text:p>
          </table:table-cell>
          <table:table-cell table:style-name="ce11" office:value-type="float" office:value="4" calcext:value-type="float">
            <text:p>4</text:p>
          </table:table-cell>
          <table:table-cell table:style-name="ce21" office:value-type="string" calcext:value-type="string">
            <text:p>2-10</text:p>
          </table:table-cell>
          <table:table-cell table:style-name="ce21" office:value-type="float" office:value="10" calcext:value-type="float">
            <text:p>10</text:p>
          </table:table-cell>
          <table:table-cell table:style-name="ce11" office:value-type="string" calcext:value-type="string">
            <text:p>栄西</text:p>
          </table:table-cell>
          <table:table-cell table:style-name="ce11" table:formula="of:=[.E143]" office:value-type="string" office:string-value="栄西" calcext:value-type="string">
            <text:p>栄西</text:p>
          </table:table-cell>
          <table:table-cell table:style-name="ce11" office:value-type="string" calcext:value-type="string">
            <text:p>えいさい</text:p>
          </table:table-cell>
          <table:table-cell table:style-name="ce11" office:value-type="string" calcext:value-type="string">
            <text:p>第２弾ブースターパック</text:p>
          </table:table-cell>
          <table:table-cell table:style-name="ce11" table:formula="of:=VLOOKUP([.H143];[$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4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3];[$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3];[$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43];[$特性番号.$A$1:$特性番号.$B$8];2;0);0)" office:value-type="float" office:value="0" calcext:value-type="float">
            <text:p>0</text:p>
          </table:table-cell>
          <table:table-cell table:style-name="ce11" office:value-type="string" calcext:value-type="string">
            <text:p>自分が1体だけでアタックしたときに発動する。このターンの間、アタッカーは「ダブルプレッシャー」を得る。¶ブロック+2000</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4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0.png</text:p>
          </table:table-cell>
          <table:table-cell table:style-name="ce11" table:formula="of:=CONCATENATE([$JSON.$A$1];[.$C143];[$JSON.$B$1];[.$E143];[$JSON.$C$1];[.F143];[$JSON.$D$1];[.$G143];[$JSON.$E$1];IF(ISNA([.$T143]);&quot;null&quot;;&quot;&quot;&quot;&quot;&amp;[.$T143]&amp;&quot;&quot;&quot;&quot;);[$JSON.$F$1];[.$V143];[$JSON.$G$1];IF(ISNA([.$X143]);&quot;null&quot;;&quot;&quot;&quot;&quot;&amp;[.$X143]&amp;&quot;&quot;&quot;&quot;);[$JSON.$H$1];[.$AA143];[$JSON.$I$1];[.$I143];[$JSON.$J$1];[.K143];[$JSON.$K$1];[.$M143];[$JSON.$L$1];[.$P143];[$JSON.$M$1];[.$O143];[$JSON.$N$1];[.$S143];[$JSON.$O$1];[.$U143];[$JSON.$P$1];IF(ISNA([.$W143]);&quot;null&quot;;[.$W143]);[$JSON.$Q$1];[.$Y143];[$JSON.$R$1];IF([.$Z143];&quot;true&quot;;&quot;false&quot;);[$JSON.$S$1];[.$A143];[$JSON.$T$1];[.$B143];[$JSON.$U$1])" office:value-type="string" office:string-value="{&quot;id&quot;:&quot;2-10&quot;,&quot;name&quot;:&quot;栄西&quot;,&quot;displayName&quot;:&quot;栄西&quot;,&quot;kana&quot;:&quot;えいさい&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rarity&quot;:1,&quot;type&quot;:1,&quot;level&quot;:1,&quot;color&quot;:1,&quot;term&quot;:0,&quot;trait&quot;:0,&quot;power&quot;:500,&quot;legacy&quot;:4,&quot;anyNumCopies&quot;:false,&quot;orderTable&quot;:142,&quot;orderDeck&quot;:4}," calcext:value-type="string">
            <text:p>{"id":"2-10","name":"栄西","displayName":"栄西","kana":"えいさい","traitText":null,"ruleText":"自分が1体だけでアタックしたときに発動する。このターンの間、アタッカーは「ダブルプレッシャー」を得る。¶ブロック+2000","legacyText":"1ドローする","imageUrl":"https://one-draw.jp/ijinden/cardlist/002/card/02_010.png","expansion":25,"rarity":1,"type":1,"level":1,"color":1,"term":0,"trait":0,"power":500,"legacy":4,"anyNumCopies":false,"orderTable":142,"orderDeck":4},</text:p>
          </table:table-cell>
          <table:table-cell table:number-columns-repeated="16356"/>
        </table:table-row>
        <table:table-row table:style-name="ro2">
          <table:table-cell table:style-name="ce11" office:value-type="float" office:value="143" calcext:value-type="float">
            <text:p>143</text:p>
          </table:table-cell>
          <table:table-cell table:style-name="ce11" office:value-type="float" office:value="88" calcext:value-type="float">
            <text:p>88</text:p>
          </table:table-cell>
          <table:table-cell table:style-name="ce21" office:value-type="string" calcext:value-type="string">
            <text:p>2-11</text:p>
          </table:table-cell>
          <table:table-cell table:style-name="ce21" office:value-type="float" office:value="11" calcext:value-type="float">
            <text:p>11</text:p>
          </table:table-cell>
          <table:table-cell table:style-name="ce11" office:value-type="string" calcext:value-type="string">
            <text:p>道元</text:p>
          </table:table-cell>
          <table:table-cell table:style-name="ce11" table:formula="of:=[.E144]" office:value-type="string" office:string-value="道元" calcext:value-type="string">
            <text:p>道元</text:p>
          </table:table-cell>
          <table:table-cell table:style-name="ce11" office:value-type="string" calcext:value-type="string">
            <text:p>どうげん</text:p>
          </table:table-cell>
          <table:table-cell table:style-name="ce11" office:value-type="string" calcext:value-type="string">
            <text:p>第２弾ブースターパック</text:p>
          </table:table-cell>
          <table:table-cell table:style-name="ce11" table:formula="of:=VLOOKUP([.H144];[$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4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4];[$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4];[$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44];[$特性番号.$A$1:$特性番号.$B$8];2;0);0)" office:value-type="float" office:value="0" calcext:value-type="float">
            <text:p>0</text:p>
          </table:table-cell>
          <table:table-cell table:style-name="ce11" office:value-type="string" calcext:value-type="string">
            <text:p>自分が1体だけでアタックしたときに発動する。このターンの間、アタッカーは相手の戦場のイジン1体につき「アタック+3000」を得る。¶ブロック+2000</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4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1.png</text:p>
          </table:table-cell>
          <table:table-cell table:style-name="ce11" table:formula="of:=CONCATENATE([$JSON.$A$1];[.$C144];[$JSON.$B$1];[.$E144];[$JSON.$C$1];[.F144];[$JSON.$D$1];[.$G144];[$JSON.$E$1];IF(ISNA([.$T144]);&quot;null&quot;;&quot;&quot;&quot;&quot;&amp;[.$T144]&amp;&quot;&quot;&quot;&quot;);[$JSON.$F$1];[.$V144];[$JSON.$G$1];IF(ISNA([.$X144]);&quot;null&quot;;&quot;&quot;&quot;&quot;&amp;[.$X144]&amp;&quot;&quot;&quot;&quot;);[$JSON.$H$1];[.$AA144];[$JSON.$I$1];[.$I144];[$JSON.$J$1];[.K144];[$JSON.$K$1];[.$M144];[$JSON.$L$1];[.$P144];[$JSON.$M$1];[.$O144];[$JSON.$N$1];[.$S144];[$JSON.$O$1];[.$U144];[$JSON.$P$1];IF(ISNA([.$W144]);&quot;null&quot;;[.$W144]);[$JSON.$Q$1];[.$Y144];[$JSON.$R$1];IF([.$Z144];&quot;true&quot;;&quot;false&quot;);[$JSON.$S$1];[.$A144];[$JSON.$T$1];[.$B144];[$JSON.$U$1])" office:value-type="string" office:string-value="{&quot;id&quot;:&quot;2-11&quot;,&quot;name&quot;:&quot;道元&quot;,&quot;displayName&quot;:&quot;道元&quot;,&quot;kana&quot;:&quot;どうげん&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rarity&quot;:1,&quot;type&quot;:1,&quot;level&quot;:3,&quot;color&quot;:1,&quot;term&quot;:0,&quot;trait&quot;:0,&quot;power&quot;:2000,&quot;legacy&quot;:4,&quot;anyNumCopies&quot;:false,&quot;orderTable&quot;:143,&quot;orderDeck&quot;:88}," calcext:value-type="string">
            <text:p>{"id":"2-11","name":"道元","displayName":"道元","kana":"どうげん","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rarity":1,"type":1,"level":3,"color":1,"term":0,"trait":0,"power":2000,"legacy":4,"anyNumCopies":false,"orderTable":143,"orderDeck":88},</text:p>
          </table:table-cell>
          <table:table-cell table:number-columns-repeated="16356"/>
        </table:table-row>
        <table:table-row table:style-name="ro2">
          <table:table-cell table:style-name="ce11" office:value-type="float" office:value="144" calcext:value-type="float">
            <text:p>144</text:p>
          </table:table-cell>
          <table:table-cell table:style-name="ce11" office:value-type="float" office:value="290" calcext:value-type="float">
            <text:p>290</text:p>
          </table:table-cell>
          <table:table-cell table:style-name="ce21" office:value-type="string" calcext:value-type="string">
            <text:p>2-12</text:p>
          </table:table-cell>
          <table:table-cell table:style-name="ce21" office:value-type="float" office:value="12" calcext:value-type="float">
            <text:p>12</text:p>
          </table:table-cell>
          <table:table-cell table:style-name="ce11" office:value-type="string" calcext:value-type="string">
            <text:p>足利義昭</text:p>
          </table:table-cell>
          <table:table-cell table:style-name="ce11" table:formula="of:=[.E145]" office:value-type="string" office:string-value="足利義昭" calcext:value-type="string">
            <text:p>足利義昭</text:p>
          </table:table-cell>
          <table:table-cell table:style-name="ce11" office:value-type="string" calcext:value-type="string">
            <text:p>あしかがよしあき</text:p>
          </table:table-cell>
          <table:table-cell table:style-name="ce11" office:value-type="string" calcext:value-type="string">
            <text:p>第２弾ブースターパック</text:p>
          </table:table-cell>
          <table:table-cell table:style-name="ce11" table:formula="of:=VLOOKUP([.H145];[$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4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5];[$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5];[$色番号.$A$1:$色番号.$B$10];2;0)" office:value-type="float" office:value="1" calcext:value-type="float">
            <text:p>1</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45];[$特性番号.$A$1:$特性番号.$B$8];2;0);0)" office:value-type="float" office:value="0" calcext:value-type="float">
            <text:p>0</text:p>
          </table:table-cell>
          <table:table-cell table:style-name="ce11" office:value-type="string" calcext:value-type="string">
            <text:p>アタッカーになったときに発動する。このターンの間、アタッカーは「イジンにブロックされず、破壊されない」を得る。</text:p>
          </table:table-cell>
          <table:table-cell table:style-name="ce11" office:value-type="float" office:value="1000" calcext:value-type="float">
            <text:p>1000</text:p>
          </table:table-cell>
          <table:table-cell table:style-name="ce25" office:value-type="string" calcext:value-type="string">
            <text:p>魔力化</text:p>
          </table:table-cell>
          <table:table-cell table:style-name="ce11" table:formula="of:=IFERROR(VLOOKUP([.$X14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2.png</text:p>
          </table:table-cell>
          <table:table-cell table:style-name="ce11" table:formula="of:=CONCATENATE([$JSON.$A$1];[.$C145];[$JSON.$B$1];[.$E145];[$JSON.$C$1];[.F145];[$JSON.$D$1];[.$G145];[$JSON.$E$1];IF(ISNA([.$T145]);&quot;null&quot;;&quot;&quot;&quot;&quot;&amp;[.$T145]&amp;&quot;&quot;&quot;&quot;);[$JSON.$F$1];[.$V145];[$JSON.$G$1];IF(ISNA([.$X145]);&quot;null&quot;;&quot;&quot;&quot;&quot;&amp;[.$X145]&amp;&quot;&quot;&quot;&quot;);[$JSON.$H$1];[.$AA145];[$JSON.$I$1];[.$I145];[$JSON.$J$1];[.K145];[$JSON.$K$1];[.$M145];[$JSON.$L$1];[.$P145];[$JSON.$M$1];[.$O145];[$JSON.$N$1];[.$S145];[$JSON.$O$1];[.$U145];[$JSON.$P$1];IF(ISNA([.$W145]);&quot;null&quot;;[.$W145]);[$JSON.$Q$1];[.$Y145];[$JSON.$R$1];IF([.$Z145];&quot;true&quot;;&quot;false&quot;);[$JSON.$S$1];[.$A145];[$JSON.$T$1];[.$B145];[$JSON.$U$1])" office:value-type="string" office:string-value="{&quot;id&quot;:&quot;2-12&quot;,&quot;name&quot;:&quot;足利義昭&quot;,&quot;displayName&quot;:&quot;足利義昭&quot;,&quot;kana&quot;:&quot;あしかがよしあき&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rarity&quot;:1,&quot;type&quot;:1,&quot;level&quot;:9,&quot;color&quot;:1,&quot;term&quot;:0,&quot;trait&quot;:0,&quot;power&quot;:1000,&quot;legacy&quot;:1,&quot;anyNumCopies&quot;:false,&quot;orderTable&quot;:144,&quot;orderDeck&quot;:290}," calcext:value-type="string">
            <text:p>{"id":"2-12","name":"足利義昭","displayName":"足利義昭","kana":"あしかがよしあき","traitText":null,"ruleText":"アタッカーになったときに発動する。このターンの間、アタッカーは「イジンにブロックされず、破壊されない」を得る。","legacyText":"魔力化","imageUrl":"https://one-draw.jp/ijinden/cardlist/002/card/02_012.png","expansion":25,"rarity":1,"type":1,"level":9,"color":1,"term":0,"trait":0,"power":1000,"legacy":1,"anyNumCopies":false,"orderTable":144,"orderDeck":290},</text:p>
          </table:table-cell>
          <table:table-cell table:number-columns-repeated="16356"/>
        </table:table-row>
        <table:table-row table:style-name="ro2">
          <table:table-cell table:style-name="ce11" office:value-type="float" office:value="145" calcext:value-type="float">
            <text:p>145</text:p>
          </table:table-cell>
          <table:table-cell table:style-name="ce11" office:value-type="float" office:value="230" calcext:value-type="float">
            <text:p>230</text:p>
          </table:table-cell>
          <table:table-cell table:style-name="ce21" office:value-type="string" calcext:value-type="string">
            <text:p>2-13</text:p>
          </table:table-cell>
          <table:table-cell table:style-name="ce21" office:value-type="float" office:value="13" calcext:value-type="float">
            <text:p>13</text:p>
          </table:table-cell>
          <table:table-cell table:style-name="ce11" office:value-type="string" calcext:value-type="string">
            <text:p>毛利輝元</text:p>
          </table:table-cell>
          <table:table-cell table:style-name="ce11" table:formula="of:=[.E146]" office:value-type="string" office:string-value="毛利輝元" calcext:value-type="string">
            <text:p>毛利輝元</text:p>
          </table:table-cell>
          <table:table-cell table:style-name="ce11" office:value-type="string" calcext:value-type="string">
            <text:p>もうりてるもと</text:p>
          </table:table-cell>
          <table:table-cell table:style-name="ce11" office:value-type="string" calcext:value-type="string">
            <text:p>第２弾ブースターパック</text:p>
          </table:table-cell>
          <table:table-cell table:style-name="ce11" table:formula="of:=VLOOKUP([.H146];[$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6];[$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6];[$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46];[$特性番号.$A$1:$特性番号.$B$8];2;0);0)" office:value-type="float" office:value="0" calcext:value-type="float">
            <text:p>0</text:p>
          </table:table-cell>
          <table:table-cell table:style-name="ce11"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4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3.png</text:p>
          </table:table-cell>
          <table:table-cell table:style-name="ce11" table:formula="of:=CONCATENATE([$JSON.$A$1];[.$C146];[$JSON.$B$1];[.$E146];[$JSON.$C$1];[.F146];[$JSON.$D$1];[.$G146];[$JSON.$E$1];IF(ISNA([.$T146]);&quot;null&quot;;&quot;&quot;&quot;&quot;&amp;[.$T146]&amp;&quot;&quot;&quot;&quot;);[$JSON.$F$1];[.$V146];[$JSON.$G$1];IF(ISNA([.$X146]);&quot;null&quot;;&quot;&quot;&quot;&quot;&amp;[.$X146]&amp;&quot;&quot;&quot;&quot;);[$JSON.$H$1];[.$AA146];[$JSON.$I$1];[.$I146];[$JSON.$J$1];[.K146];[$JSON.$K$1];[.$M146];[$JSON.$L$1];[.$P146];[$JSON.$M$1];[.$O146];[$JSON.$N$1];[.$S146];[$JSON.$O$1];[.$U146];[$JSON.$P$1];IF(ISNA([.$W146]);&quot;null&quot;;[.$W146]);[$JSON.$Q$1];[.$Y146];[$JSON.$R$1];IF([.$Z146];&quot;true&quot;;&quot;false&quot;);[$JSON.$S$1];[.$A146];[$JSON.$T$1];[.$B146];[$JSON.$U$1])" office:value-type="string" office:string-value="{&quot;id&quot;:&quot;2-13&quot;,&quot;name&quot;:&quot;毛利輝元&quot;,&quot;displayName&quot;:&quot;毛利輝元&quot;,&quot;kana&quot;:&quot;もうりてるもと&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rarity&quot;:1,&quot;type&quot;:1,&quot;level&quot;:6,&quot;color&quot;:1,&quot;term&quot;:0,&quot;trait&quot;:0,&quot;power&quot;:7000,&quot;legacy&quot;:0,&quot;anyNumCopies&quot;:false,&quot;orderTable&quot;:145,&quot;orderDeck&quot;:230}," calcext:value-type="string">
            <text:p>{"id":"2-13","name":"毛利輝元","displayName":"毛利輝元","kana":"もうりてるもと","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rarity":1,"type":1,"level":6,"color":1,"term":0,"trait":0,"power":7000,"legacy":0,"anyNumCopies":false,"orderTable":145,"orderDeck":230},</text:p>
          </table:table-cell>
          <table:table-cell table:number-columns-repeated="16356"/>
        </table:table-row>
        <table:table-row table:style-name="ro2">
          <table:table-cell table:style-name="ce11" office:value-type="float" office:value="146" calcext:value-type="float">
            <text:p>146</text:p>
          </table:table-cell>
          <table:table-cell table:style-name="ce11" office:value-type="float" office:value="187" calcext:value-type="float">
            <text:p>187</text:p>
          </table:table-cell>
          <table:table-cell table:style-name="ce21" office:value-type="string" calcext:value-type="string">
            <text:p>2-14</text:p>
          </table:table-cell>
          <table:table-cell table:style-name="ce21" office:value-type="float" office:value="14" calcext:value-type="float">
            <text:p>14</text:p>
          </table:table-cell>
          <table:table-cell table:style-name="ce11" office:value-type="string" calcext:value-type="string">
            <text:p>北条時政</text:p>
          </table:table-cell>
          <table:table-cell table:style-name="ce11" table:formula="of:=[.E147]" office:value-type="string" office:string-value="北条時政" calcext:value-type="string">
            <text:p>北条時政</text:p>
          </table:table-cell>
          <table:table-cell table:style-name="ce11" office:value-type="string" calcext:value-type="string">
            <text:p>ほうじょうときまさ</text:p>
          </table:table-cell>
          <table:table-cell table:style-name="ce11" office:value-type="string" calcext:value-type="string">
            <text:p>第２弾ブースターパック</text:p>
          </table:table-cell>
          <table:table-cell table:style-name="ce11" table:formula="of:=VLOOKUP([.H147];[$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7];[$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7];[$能力語番号.$A$1:$能力語番号.$B$11];2;0);0)" office:value-type="float" office:value="0" calcext:value-type="float">
            <text:p>0</text:p>
          </table:table-cell>
          <table:table-cell office:value-type="string" calcext:value-type="string">
            <text:p>剣術</text:p>
          </table:table-cell>
          <table:table-cell table:style-name="ce11" table:formula="of:=IFERROR(VLOOKUP([.$T147];[$特性番号.$A$1:$特性番号.$B$8];2;0);0)" office:value-type="float" office:value="1" calcext:value-type="float">
            <text:p>1</text:p>
          </table:table-cell>
          <table:table-cell table:style-name="ce11"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4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4.png</text:p>
          </table:table-cell>
          <table:table-cell table:style-name="ce11" table:formula="of:=CONCATENATE([$JSON.$A$1];[.$C147];[$JSON.$B$1];[.$E147];[$JSON.$C$1];[.F147];[$JSON.$D$1];[.$G147];[$JSON.$E$1];IF(ISNA([.$T147]);&quot;null&quot;;&quot;&quot;&quot;&quot;&amp;[.$T147]&amp;&quot;&quot;&quot;&quot;);[$JSON.$F$1];[.$V147];[$JSON.$G$1];IF(ISNA([.$X147]);&quot;null&quot;;&quot;&quot;&quot;&quot;&amp;[.$X147]&amp;&quot;&quot;&quot;&quot;);[$JSON.$H$1];[.$AA147];[$JSON.$I$1];[.$I147];[$JSON.$J$1];[.K147];[$JSON.$K$1];[.$M147];[$JSON.$L$1];[.$P147];[$JSON.$M$1];[.$O147];[$JSON.$N$1];[.$S147];[$JSON.$O$1];[.$U147];[$JSON.$P$1];IF(ISNA([.$W147]);&quot;null&quot;;[.$W147]);[$JSON.$Q$1];[.$Y147];[$JSON.$R$1];IF([.$Z147];&quot;true&quot;;&quot;false&quot;);[$JSON.$S$1];[.$A147];[$JSON.$T$1];[.$B147];[$JSON.$U$1])" office:value-type="string" office:string-value="{&quot;id&quot;:&quot;2-14&quot;,&quot;name&quot;:&quot;北条時政&quot;,&quot;displayName&quot;:&quot;北条時政&quot;,&quot;kana&quot;:&quot;ほうじょうときまさ&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rarity&quot;:1,&quot;type&quot;:1,&quot;level&quot;:5,&quot;color&quot;:1,&quot;term&quot;:0,&quot;trait&quot;:1,&quot;power&quot;:1000,&quot;legacy&quot;:4,&quot;anyNumCopies&quot;:false,&quot;orderTable&quot;:146,&quot;orderDeck&quot;:187}," calcext:value-type="string">
            <text:p>{"id":"2-14","name":"北条時政","displayName":"北条時政","kana":"ほうじょうときまさ","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rarity":1,"type":1,"level":5,"color":1,"term":0,"trait":1,"power":1000,"legacy":4,"anyNumCopies":false,"orderTable":146,"orderDeck":187},</text:p>
          </table:table-cell>
          <table:table-cell table:number-columns-repeated="16356"/>
        </table:table-row>
        <table:table-row table:style-name="ro2">
          <table:table-cell table:style-name="ce11" office:value-type="float" office:value="147" calcext:value-type="float">
            <text:p>147</text:p>
          </table:table-cell>
          <table:table-cell table:style-name="ce11" office:value-type="float" office:value="259" calcext:value-type="float">
            <text:p>259</text:p>
          </table:table-cell>
          <table:table-cell table:style-name="ce21" office:value-type="string" calcext:value-type="string">
            <text:p>2-15</text:p>
          </table:table-cell>
          <table:table-cell table:style-name="ce21" office:value-type="float" office:value="15" calcext:value-type="float">
            <text:p>15</text:p>
          </table:table-cell>
          <table:table-cell table:style-name="ce11" office:value-type="string" calcext:value-type="string">
            <text:p>北条時宗</text:p>
          </table:table-cell>
          <table:table-cell table:style-name="ce11" table:formula="of:=[.E148]" office:value-type="string" office:string-value="北条時宗" calcext:value-type="string">
            <text:p>北条時宗</text:p>
          </table:table-cell>
          <table:table-cell table:style-name="ce11" office:value-type="string" calcext:value-type="string">
            <text:p>ほうじょうときむね</text:p>
          </table:table-cell>
          <table:table-cell table:style-name="ce11" office:value-type="string" calcext:value-type="string">
            <text:p>第２弾ブースターパック</text:p>
          </table:table-cell>
          <table:table-cell table:style-name="ce11" table:formula="of:=VLOOKUP([.H148];[$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8];[$種類番号.$A$1:$種類番号.$B$4];2;0)" office:value-type="float" office:value="1" calcext:value-type="float">
            <text:p>1</text:p>
          </table:table-cell>
          <table:table-cell table:style-name="ce11" office:value-type="string" calcext:value-type="string">
            <text:p>赤</text:p>
          </table:table-cell>
          <table:table-cell table:style-name="ce11" table:formula="of:=VLOOKUP([.N148];[$色番号.$A$1:$色番号.$B$10];2;0)" office:value-type="float" office:value="1" calcext:value-type="float">
            <text:p>1</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48];[$特性番号.$A$1:$特性番号.$B$8];2;0);0)" office:value-type="float" office:value="0" calcext:value-type="float">
            <text:p>0</text:p>
          </table:table-cell>
          <table:table-cell table:style-name="ce11" office:value-type="string" calcext:value-type="string">
            <text:p>即応¶ガーディアンが相手の戦場に4体以上いる間「トリプルプレッシャー」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4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5.png</text:p>
          </table:table-cell>
          <table:table-cell table:style-name="ce11" table:formula="of:=CONCATENATE([$JSON.$A$1];[.$C148];[$JSON.$B$1];[.$E148];[$JSON.$C$1];[.F148];[$JSON.$D$1];[.$G148];[$JSON.$E$1];IF(ISNA([.$T148]);&quot;null&quot;;&quot;&quot;&quot;&quot;&amp;[.$T148]&amp;&quot;&quot;&quot;&quot;);[$JSON.$F$1];[.$V148];[$JSON.$G$1];IF(ISNA([.$X148]);&quot;null&quot;;&quot;&quot;&quot;&quot;&amp;[.$X148]&amp;&quot;&quot;&quot;&quot;);[$JSON.$H$1];[.$AA148];[$JSON.$I$1];[.$I148];[$JSON.$J$1];[.K148];[$JSON.$K$1];[.$M148];[$JSON.$L$1];[.$P148];[$JSON.$M$1];[.$O148];[$JSON.$N$1];[.$S148];[$JSON.$O$1];[.$U148];[$JSON.$P$1];IF(ISNA([.$W148]);&quot;null&quot;;[.$W148]);[$JSON.$Q$1];[.$Y148];[$JSON.$R$1];IF([.$Z148];&quot;true&quot;;&quot;false&quot;);[$JSON.$S$1];[.$A148];[$JSON.$T$1];[.$B148];[$JSON.$U$1])" office:value-type="string" office:string-value="{&quot;id&quot;:&quot;2-15&quot;,&quot;name&quot;:&quot;北条時宗&quot;,&quot;displayName&quot;:&quot;北条時宗&quot;,&quot;kana&quot;:&quot;ほうじょうときむね&quot;,&quot;traitText&quot;:null,&quot;ruleText&quot;:&quot;即応¶ガーディアンが相手の戦場に4体以上いる間「トリプルプレッシャー」を得る。&quot;,&quot;legacyText&quot;:null,&quot;imageUrl&quot;:&quot;https://one-draw.jp/ijinden/cardlist/002/card/02_015.png&quot;,&quot;expansion&quot;:25,&quot;rarity&quot;:1,&quot;type&quot;:1,&quot;level&quot;:7,&quot;color&quot;:1,&quot;term&quot;:0,&quot;trait&quot;:0,&quot;power&quot;:7000,&quot;legacy&quot;:0,&quot;anyNumCopies&quot;:false,&quot;orderTable&quot;:147,&quot;orderDeck&quot;:259}," calcext:value-type="string">
            <text:p>{"id":"2-15","name":"北条時宗","displayName":"北条時宗","kana":"ほうじょうときむね","traitText":null,"ruleText":"即応¶ガーディアンが相手の戦場に4体以上いる間「トリプルプレッシャー」を得る。","legacyText":null,"imageUrl":"https://one-draw.jp/ijinden/cardlist/002/card/02_015.png","expansion":25,"rarity":1,"type":1,"level":7,"color":1,"term":0,"trait":0,"power":7000,"legacy":0,"anyNumCopies":false,"orderTable":147,"orderDeck":259},</text:p>
          </table:table-cell>
          <table:table-cell table:number-columns-repeated="16356"/>
        </table:table-row>
        <table:table-row table:style-name="ro2">
          <table:table-cell table:style-name="ce11" office:value-type="float" office:value="148" calcext:value-type="float">
            <text:p>148</text:p>
          </table:table-cell>
          <table:table-cell table:style-name="ce11" office:value-type="float" office:value="46" calcext:value-type="float">
            <text:p>46</text:p>
          </table:table-cell>
          <table:table-cell table:style-name="ce21" office:value-type="string" calcext:value-type="string">
            <text:p>2-16</text:p>
          </table:table-cell>
          <table:table-cell table:style-name="ce21" office:value-type="float" office:value="16" calcext:value-type="float">
            <text:p>16</text:p>
          </table:table-cell>
          <table:table-cell table:style-name="ce11" office:value-type="string" calcext:value-type="string">
            <text:p>シャルル・ド・モンテスキュー</text:p>
          </table:table-cell>
          <table:table-cell table:style-name="ce11" table:formula="of:=[.E149]" office:value-type="string" office:string-value="シャルル・ド・モンテスキュー" calcext:value-type="string">
            <text:p>シャルル・ド・モンテスキュー</text:p>
          </table:table-cell>
          <table:table-cell table:style-name="ce11" office:value-type="string" calcext:value-type="string">
            <text:p>しゃるるどもんてすきゅー</text:p>
          </table:table-cell>
          <table:table-cell table:style-name="ce11" office:value-type="string" calcext:value-type="string">
            <text:p>第２弾ブースターパック</text:p>
          </table:table-cell>
          <table:table-cell table:style-name="ce11" table:formula="of:=VLOOKUP([.H149];[$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49];[$種類番号.$A$1:$種類番号.$B$4];2;0)" office:value-type="float" office:value="1" calcext:value-type="float">
            <text:p>1</text:p>
          </table:table-cell>
          <table:table-cell table:style-name="ce11" office:value-type="string" calcext:value-type="string">
            <text:p>青</text:p>
          </table:table-cell>
          <table:table-cell table:style-name="ce11" table:formula="of:=VLOOKUP([.N149];[$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49];[$能力語番号.$A$1:$能力語番号.$B$11];2;0);0)" office:value-type="float" office:value="0" calcext:value-type="float">
            <text:p>0</text:p>
          </table:table-cell>
          <table:table-cell office:value-type="string" calcext:value-type="string">
            <text:p>思想</text:p>
          </table:table-cell>
          <table:table-cell table:style-name="ce11" table:formula="of:=IFERROR(VLOOKUP([.$T149];[$特性番号.$A$1:$特性番号.$B$8];2;0);0)" office:value-type="float" office:value="8" calcext:value-type="float">
            <text:p>8</text:p>
          </table:table-cell>
          <table:table-cell table:style-name="ce11"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4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6.png</text:p>
          </table:table-cell>
          <table:table-cell table:style-name="ce11" table:formula="of:=CONCATENATE([$JSON.$A$1];[.$C149];[$JSON.$B$1];[.$E149];[$JSON.$C$1];[.F149];[$JSON.$D$1];[.$G149];[$JSON.$E$1];IF(ISNA([.$T149]);&quot;null&quot;;&quot;&quot;&quot;&quot;&amp;[.$T149]&amp;&quot;&quot;&quot;&quot;);[$JSON.$F$1];[.$V149];[$JSON.$G$1];IF(ISNA([.$X149]);&quot;null&quot;;&quot;&quot;&quot;&quot;&amp;[.$X149]&amp;&quot;&quot;&quot;&quot;);[$JSON.$H$1];[.$AA149];[$JSON.$I$1];[.$I149];[$JSON.$J$1];[.K149];[$JSON.$K$1];[.$M149];[$JSON.$L$1];[.$P149];[$JSON.$M$1];[.$O149];[$JSON.$N$1];[.$S149];[$JSON.$O$1];[.$U149];[$JSON.$P$1];IF(ISNA([.$W149]);&quot;null&quot;;[.$W149]);[$JSON.$Q$1];[.$Y149];[$JSON.$R$1];IF([.$Z149];&quot;true&quot;;&quot;false&quot;);[$JSON.$S$1];[.$A149];[$JSON.$T$1];[.$B149];[$JSON.$U$1])" office:value-type="string" office:string-value="{&quot;id&quot;:&quot;2-16&quot;,&quot;name&quot;:&quot;シャルル・ド・モンテスキュー&quot;,&quot;displayName&quot;:&quot;シャルル・ド・モンテスキュー&quot;,&quot;kana&quot;:&quot;しゃるるどもんてすきゅ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rarity&quot;:1,&quot;type&quot;:1,&quot;level&quot;:2,&quot;color&quot;:2,&quot;term&quot;:0,&quot;trait&quot;:8,&quot;power&quot;:1000,&quot;legacy&quot;:4,&quot;anyNumCopies&quot;:false,&quot;orderTable&quot;:148,&quot;orderDeck&quot;:46}," calcext:value-type="string">
            <text:p>{"id":"2-16","name":"シャルル・ド・モンテスキュー","displayName":"シャルル・ド・モンテスキュー","kana":"しゃるるどもんてすきゅ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rarity":1,"type":1,"level":2,"color":2,"term":0,"trait":8,"power":1000,"legacy":4,"anyNumCopies":false,"orderTable":148,"orderDeck":46},</text:p>
          </table:table-cell>
          <table:table-cell table:number-columns-repeated="16356"/>
        </table:table-row>
        <table:table-row table:style-name="ro2">
          <table:table-cell table:style-name="ce11" office:value-type="float" office:value="149" calcext:value-type="float">
            <text:p>149</text:p>
          </table:table-cell>
          <table:table-cell table:style-name="ce11" office:value-type="float" office:value="101" calcext:value-type="float">
            <text:p>101</text:p>
          </table:table-cell>
          <table:table-cell table:style-name="ce21" office:value-type="string" calcext:value-type="string">
            <text:p>2-17</text:p>
          </table:table-cell>
          <table:table-cell table:style-name="ce21" office:value-type="float" office:value="17" calcext:value-type="float">
            <text:p>17</text:p>
          </table:table-cell>
          <table:table-cell table:style-name="ce11" office:value-type="string" calcext:value-type="string">
            <text:p>ジャン＝ジャック・ルソー</text:p>
          </table:table-cell>
          <table:table-cell table:style-name="ce11" table:formula="of:=[.E150]" office:value-type="string" office:string-value="ジャン＝ジャック・ルソー" calcext:value-type="string">
            <text:p>ジャン＝ジャック・ルソー</text:p>
          </table:table-cell>
          <table:table-cell table:style-name="ce11" office:value-type="string" calcext:value-type="string">
            <text:p>じゃんじゃっくるそー</text:p>
          </table:table-cell>
          <table:table-cell table:style-name="ce11" office:value-type="string" calcext:value-type="string">
            <text:p>第２弾ブースターパック</text:p>
          </table:table-cell>
          <table:table-cell table:style-name="ce11" table:formula="of:=VLOOKUP([.H150];[$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0];[$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0];[$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0];[$能力語番号.$A$1:$能力語番号.$B$11];2;0);0)" office:value-type="float" office:value="0" calcext:value-type="float">
            <text:p>0</text:p>
          </table:table-cell>
          <table:table-cell office:value-type="string" calcext:value-type="string">
            <text:p>思想</text:p>
          </table:table-cell>
          <table:table-cell table:style-name="ce11" table:formula="of:=IFERROR(VLOOKUP([.$T150];[$特性番号.$A$1:$特性番号.$B$8];2;0);0)" office:value-type="float" office:value="8" calcext:value-type="float">
            <text:p>8</text:p>
          </table:table-cell>
          <table:table-cell table:style-name="ce11" office:value-type="string" calcext:value-type="string">
            <text:p>戦場に置かれたとき、自分の手札1枚を墓地に置いて、戦場で最も高いパワーを持つイジン1体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5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7.png</text:p>
          </table:table-cell>
          <table:table-cell table:style-name="ce11" table:formula="of:=CONCATENATE([$JSON.$A$1];[.$C150];[$JSON.$B$1];[.$E150];[$JSON.$C$1];[.F150];[$JSON.$D$1];[.$G150];[$JSON.$E$1];IF(ISNA([.$T150]);&quot;null&quot;;&quot;&quot;&quot;&quot;&amp;[.$T150]&amp;&quot;&quot;&quot;&quot;);[$JSON.$F$1];[.$V150];[$JSON.$G$1];IF(ISNA([.$X150]);&quot;null&quot;;&quot;&quot;&quot;&quot;&amp;[.$X150]&amp;&quot;&quot;&quot;&quot;);[$JSON.$H$1];[.$AA150];[$JSON.$I$1];[.$I150];[$JSON.$J$1];[.K150];[$JSON.$K$1];[.$M150];[$JSON.$L$1];[.$P150];[$JSON.$M$1];[.$O150];[$JSON.$N$1];[.$S150];[$JSON.$O$1];[.$U150];[$JSON.$P$1];IF(ISNA([.$W150]);&quot;null&quot;;[.$W150]);[$JSON.$Q$1];[.$Y150];[$JSON.$R$1];IF([.$Z150];&quot;true&quot;;&quot;false&quot;);[$JSON.$S$1];[.$A150];[$JSON.$T$1];[.$B150];[$JSON.$U$1])" office:value-type="string" office:string-value="{&quot;id&quot;:&quot;2-17&quot;,&quot;name&quot;:&quot;ジャン＝ジャック・ルソー&quot;,&quot;displayName&quot;:&quot;ジャン＝ジャック・ルソー&quot;,&quot;kana&quot;:&quot;じゃんじゃっくるそ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rarity&quot;:1,&quot;type&quot;:1,&quot;level&quot;:3,&quot;color&quot;:2,&quot;term&quot;:0,&quot;trait&quot;:8,&quot;power&quot;:1000,&quot;legacy&quot;:4,&quot;anyNumCopies&quot;:false,&quot;orderTable&quot;:149,&quot;orderDeck&quot;:101}," calcext:value-type="string">
            <text:p>{"id":"2-17","name":"ジャン＝ジャック・ルソー","displayName":"ジャン＝ジャック・ルソー","kana":"じゃんじゃっくるそー","traitText":"思想","ruleText":"戦場に置かれたとき、自分の手札1枚を墓地に置いて、戦場で最も高いパワーを持つイジン1体を破壊する。","legacyText":"1ドローする","imageUrl":"https://one-draw.jp/ijinden/cardlist/002/card/02_017.png","expansion":25,"rarity":1,"type":1,"level":3,"color":2,"term":0,"trait":8,"power":1000,"legacy":4,"anyNumCopies":false,"orderTable":149,"orderDeck":101},</text:p>
          </table:table-cell>
          <table:table-cell table:number-columns-repeated="16356"/>
        </table:table-row>
        <table:table-row table:style-name="ro2">
          <table:table-cell table:style-name="ce11" office:value-type="float" office:value="150" calcext:value-type="float">
            <text:p>150</text:p>
          </table:table-cell>
          <table:table-cell table:style-name="ce11" office:value-type="float" office:value="47" calcext:value-type="float">
            <text:p>47</text:p>
          </table:table-cell>
          <table:table-cell table:style-name="ce21" office:value-type="string" calcext:value-type="string">
            <text:p>2-18</text:p>
          </table:table-cell>
          <table:table-cell table:style-name="ce21" office:value-type="float" office:value="18" calcext:value-type="float">
            <text:p>18</text:p>
          </table:table-cell>
          <table:table-cell table:style-name="ce11" office:value-type="string" calcext:value-type="string">
            <text:p>エカチェリーナ2世</text:p>
          </table:table-cell>
          <table:table-cell table:style-name="ce11" table:formula="of:=[.E151]" office:value-type="string" office:string-value="エカチェリーナ2世" calcext:value-type="string">
            <text:p>エカチェリーナ2世</text:p>
          </table:table-cell>
          <table:table-cell table:style-name="ce11" office:value-type="string" calcext:value-type="string">
            <text:p>えかちぇりーなにせい</text:p>
          </table:table-cell>
          <table:table-cell table:style-name="ce11" office:value-type="string" calcext:value-type="string">
            <text:p>第２弾ブースターパック</text:p>
          </table:table-cell>
          <table:table-cell table:style-name="ce11" table:formula="of:=VLOOKUP([.H151];[$収録番号.$A$1:$収録番号.$B$10];2;0)" office:value-type="float" office:value="25" calcext:value-type="float">
            <text:p>25</text:p>
          </table:table-cell>
          <table:table-cell table:style-name="ce11" office:value-type="string" calcext:value-type="string">
            <text:p>R</text:p>
          </table:table-cell>
          <table:table-cell table:style-name="ce11" table:formula="of:=VLOOKUP([.J15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1];[$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51];[$特性番号.$A$1:$特性番号.$B$8];2;0);0)" office:value-type="float" office:value="0" calcext:value-type="float">
            <text:p>0</text:p>
          </table:table-cell>
          <table:table-cell table:style-name="ce11" office:value-type="string" calcext:value-type="string">
            <text:p>マリョクが相手の魔力ゾーンに3つ以上ある間、相手は表向きでマリョク配置できない。¶相手の魔力ゾーンにあるマリョク1つにつき「パワー+1000」を得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8.png</text:p>
          </table:table-cell>
          <table:table-cell table:style-name="ce11" table:formula="of:=CONCATENATE([$JSON.$A$1];[.$C151];[$JSON.$B$1];[.$E151];[$JSON.$C$1];[.F151];[$JSON.$D$1];[.$G151];[$JSON.$E$1];IF(ISNA([.$T151]);&quot;null&quot;;&quot;&quot;&quot;&quot;&amp;[.$T151]&amp;&quot;&quot;&quot;&quot;);[$JSON.$F$1];[.$V151];[$JSON.$G$1];IF(ISNA([.$X151]);&quot;null&quot;;&quot;&quot;&quot;&quot;&amp;[.$X151]&amp;&quot;&quot;&quot;&quot;);[$JSON.$H$1];[.$AA151];[$JSON.$I$1];[.$I151];[$JSON.$J$1];[.K151];[$JSON.$K$1];[.$M151];[$JSON.$L$1];[.$P151];[$JSON.$M$1];[.$O151];[$JSON.$N$1];[.$S151];[$JSON.$O$1];[.$U151];[$JSON.$P$1];IF(ISNA([.$W151]);&quot;null&quot;;[.$W151]);[$JSON.$Q$1];[.$Y151];[$JSON.$R$1];IF([.$Z151];&quot;true&quot;;&quot;false&quot;);[$JSON.$S$1];[.$A151];[$JSON.$T$1];[.$B151];[$JSON.$U$1])" office:value-type="string" office:string-value="{&quot;id&quot;:&quot;2-18&quot;,&quot;name&quot;:&quot;エカチェリーナ2世&quot;,&quot;displayName&quot;:&quot;エカチェリーナ2世&quot;,&quot;kana&quot;:&quot;えかちぇりーなにせい&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rarity&quot;:2,&quot;type&quot;:1,&quot;level&quot;:2,&quot;color&quot;:2,&quot;term&quot;:0,&quot;trait&quot;:0,&quot;power&quot;:500,&quot;legacy&quot;:4,&quot;anyNumCopies&quot;:false,&quot;orderTable&quot;:150,&quot;orderDeck&quot;:47}," calcext:value-type="string">
            <text:p>{"id":"2-18","name":"エカチェリーナ2世","displayName":"エカチェリーナ2世","kana":"えかちぇりーなにせい","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rarity":2,"type":1,"level":2,"color":2,"term":0,"trait":0,"power":500,"legacy":4,"anyNumCopies":false,"orderTable":150,"orderDeck":47},</text:p>
          </table:table-cell>
          <table:table-cell table:number-columns-repeated="16356"/>
        </table:table-row>
        <table:table-row table:style-name="ro2">
          <table:table-cell table:style-name="ce11" office:value-type="float" office:value="151" calcext:value-type="float">
            <text:p>151</text:p>
          </table:table-cell>
          <table:table-cell table:style-name="ce11" office:value-type="float" office:value="9" calcext:value-type="float">
            <text:p>9</text:p>
          </table:table-cell>
          <table:table-cell table:style-name="ce21" office:value-type="string" calcext:value-type="string">
            <text:p>2-19</text:p>
          </table:table-cell>
          <table:table-cell table:style-name="ce21" office:value-type="float" office:value="19" calcext:value-type="float">
            <text:p>19</text:p>
          </table:table-cell>
          <table:table-cell table:style-name="ce11" office:value-type="string" calcext:value-type="string">
            <text:p>ジョン・ロック</text:p>
          </table:table-cell>
          <table:table-cell table:style-name="ce11" table:formula="of:=[.E152]" office:value-type="string" office:string-value="ジョン・ロック" calcext:value-type="string">
            <text:p>ジョン・ロック</text:p>
          </table:table-cell>
          <table:table-cell table:style-name="ce11" office:value-type="string" calcext:value-type="string">
            <text:p>じょんろっく</text:p>
          </table:table-cell>
          <table:table-cell table:style-name="ce11" office:value-type="string" calcext:value-type="string">
            <text:p>第２弾ブースターパック</text:p>
          </table:table-cell>
          <table:table-cell table:style-name="ce11" table:formula="of:=VLOOKUP([.H152];[$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2];[$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2];[$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2];[$能力語番号.$A$1:$能力語番号.$B$11];2;0);0)" office:value-type="float" office:value="0" calcext:value-type="float">
            <text:p>0</text:p>
          </table:table-cell>
          <table:table-cell office:value-type="string" calcext:value-type="string">
            <text:p>思想</text:p>
          </table:table-cell>
          <table:table-cell table:style-name="ce11" table:formula="of:=IFERROR(VLOOKUP([.$T152];[$特性番号.$A$1:$特性番号.$B$8];2;0);0)" office:value-type="float" office:value="8" calcext:value-type="float">
            <text:p>8</text:p>
          </table:table-cell>
          <table:table-cell table:style-name="ce11" office:value-type="string" calcext:value-type="string">
            <text:p>自分の戦場のガーディアンが破壊されるたびに発動できる。アタッカー1体を手札に戻す。</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19.png</text:p>
          </table:table-cell>
          <table:table-cell table:style-name="ce11" table:formula="of:=CONCATENATE([$JSON.$A$1];[.$C152];[$JSON.$B$1];[.$E152];[$JSON.$C$1];[.F152];[$JSON.$D$1];[.$G152];[$JSON.$E$1];IF(ISNA([.$T152]);&quot;null&quot;;&quot;&quot;&quot;&quot;&amp;[.$T152]&amp;&quot;&quot;&quot;&quot;);[$JSON.$F$1];[.$V152];[$JSON.$G$1];IF(ISNA([.$X152]);&quot;null&quot;;&quot;&quot;&quot;&quot;&amp;[.$X152]&amp;&quot;&quot;&quot;&quot;);[$JSON.$H$1];[.$AA152];[$JSON.$I$1];[.$I152];[$JSON.$J$1];[.K152];[$JSON.$K$1];[.$M152];[$JSON.$L$1];[.$P152];[$JSON.$M$1];[.$O152];[$JSON.$N$1];[.$S152];[$JSON.$O$1];[.$U152];[$JSON.$P$1];IF(ISNA([.$W152]);&quot;null&quot;;[.$W152]);[$JSON.$Q$1];[.$Y152];[$JSON.$R$1];IF([.$Z152];&quot;true&quot;;&quot;false&quot;);[$JSON.$S$1];[.$A152];[$JSON.$T$1];[.$B152];[$JSON.$U$1])" office:value-type="string" office:string-value="{&quot;id&quot;:&quot;2-19&quot;,&quot;name&quot;:&quot;ジョン・ロック&quot;,&quot;displayName&quot;:&quot;ジョン・ロック&quot;,&quot;kana&quot;:&quot;じょんろっく&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rarity&quot;:1,&quot;type&quot;:1,&quot;level&quot;:1,&quot;color&quot;:2,&quot;term&quot;:0,&quot;trait&quot;:8,&quot;power&quot;:500,&quot;legacy&quot;:4,&quot;anyNumCopies&quot;:false,&quot;orderTable&quot;:151,&quot;orderDeck&quot;:9}," calcext:value-type="string">
            <text:p>{"id":"2-19","name":"ジョン・ロック","displayName":"ジョン・ロック","kana":"じょんろっく","traitText":"思想","ruleText":"自分の戦場のガーディアンが破壊されるたびに発動できる。アタッカー1体を手札に戻す。","legacyText":"1ドローする","imageUrl":"https://one-draw.jp/ijinden/cardlist/002/card/02_019.png","expansion":25,"rarity":1,"type":1,"level":1,"color":2,"term":0,"trait":8,"power":500,"legacy":4,"anyNumCopies":false,"orderTable":151,"orderDeck":9},</text:p>
          </table:table-cell>
          <table:table-cell table:number-columns-repeated="16356"/>
        </table:table-row>
        <table:table-row table:style-name="ro2">
          <table:table-cell table:style-name="ce11" office:value-type="float" office:value="152" calcext:value-type="float">
            <text:p>152</text:p>
          </table:table-cell>
          <table:table-cell table:style-name="ce11" office:value-type="float" office:value="48" calcext:value-type="float">
            <text:p>48</text:p>
          </table:table-cell>
          <table:table-cell table:style-name="ce21" office:value-type="string" calcext:value-type="string">
            <text:p>2-20</text:p>
          </table:table-cell>
          <table:table-cell table:style-name="ce21" office:value-type="float" office:value="20" calcext:value-type="float">
            <text:p>20</text:p>
          </table:table-cell>
          <table:table-cell table:style-name="ce11" office:value-type="string" calcext:value-type="string">
            <text:p>洪秀全</text:p>
          </table:table-cell>
          <table:table-cell table:style-name="ce11" table:formula="of:=[.E153]" office:value-type="string" office:string-value="洪秀全" calcext:value-type="string">
            <text:p>洪秀全</text:p>
          </table:table-cell>
          <table:table-cell table:style-name="ce11" office:value-type="string" calcext:value-type="string">
            <text:p>こうしゅうぜん</text:p>
          </table:table-cell>
          <table:table-cell table:style-name="ce11" office:value-type="string" calcext:value-type="string">
            <text:p>第２弾ブースターパック</text:p>
          </table:table-cell>
          <table:table-cell table:style-name="ce11" table:formula="of:=VLOOKUP([.H153];[$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5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3];[$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3];[$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53];[$能力語番号.$A$1:$能力語番号.$B$11];2;0);0)" office:value-type="float" office:value="8" calcext:value-type="float">
            <text:p>8</text:p>
          </table:table-cell>
          <table:table-cell table:formula="of:=NA()" office:value-type="string" office:string-value="" calcext:value-type="error">
            <text:p>#N/A</text:p>
          </table:table-cell>
          <table:table-cell table:style-name="ce11" table:formula="of:=IFERROR(VLOOKUP([.$T153];[$特性番号.$A$1:$特性番号.$B$8];2;0);0)" office:value-type="float" office:value="0" calcext:value-type="float">
            <text:p>0</text:p>
          </table:table-cell>
          <table:table-cell table:style-name="ce11"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5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0.png</text:p>
          </table:table-cell>
          <table:table-cell table:style-name="ce11" table:formula="of:=CONCATENATE([$JSON.$A$1];[.$C153];[$JSON.$B$1];[.$E153];[$JSON.$C$1];[.F153];[$JSON.$D$1];[.$G153];[$JSON.$E$1];IF(ISNA([.$T153]);&quot;null&quot;;&quot;&quot;&quot;&quot;&amp;[.$T153]&amp;&quot;&quot;&quot;&quot;);[$JSON.$F$1];[.$V153];[$JSON.$G$1];IF(ISNA([.$X153]);&quot;null&quot;;&quot;&quot;&quot;&quot;&amp;[.$X153]&amp;&quot;&quot;&quot;&quot;);[$JSON.$H$1];[.$AA153];[$JSON.$I$1];[.$I153];[$JSON.$J$1];[.K153];[$JSON.$K$1];[.$M153];[$JSON.$L$1];[.$P153];[$JSON.$M$1];[.$O153];[$JSON.$N$1];[.$S153];[$JSON.$O$1];[.$U153];[$JSON.$P$1];IF(ISNA([.$W153]);&quot;null&quot;;[.$W153]);[$JSON.$Q$1];[.$Y153];[$JSON.$R$1];IF([.$Z153];&quot;true&quot;;&quot;false&quot;);[$JSON.$S$1];[.$A153];[$JSON.$T$1];[.$B153];[$JSON.$U$1])" office:value-type="string" office:string-value="{&quot;id&quot;:&quot;2-20&quot;,&quot;name&quot;:&quot;洪秀全&quot;,&quot;displayName&quot;:&quot;洪秀全&quot;,&quot;kana&quot;:&quot;こうしゅうぜん&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rarity&quot;:1,&quot;type&quot;:1,&quot;level&quot;:2,&quot;color&quot;:2,&quot;term&quot;:8,&quot;trait&quot;:0,&quot;power&quot;:500,&quot;legacy&quot;:4,&quot;anyNumCopies&quot;:false,&quot;orderTable&quot;:152,&quot;orderDeck&quot;:48}," calcext:value-type="string">
            <text:p>{"id":"2-20","name":"洪秀全","displayName":"洪秀全","kana":"こうしゅうぜん","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rarity":1,"type":1,"level":2,"color":2,"term":8,"trait":0,"power":500,"legacy":4,"anyNumCopies":false,"orderTable":152,"orderDeck":48},</text:p>
          </table:table-cell>
          <table:table-cell table:number-columns-repeated="16356"/>
        </table:table-row>
        <table:table-row table:style-name="ro2">
          <table:table-cell table:style-name="ce11" office:value-type="float" office:value="153" calcext:value-type="float">
            <text:p>153</text:p>
          </table:table-cell>
          <table:table-cell table:style-name="ce11" office:value-type="float" office:value="102" calcext:value-type="float">
            <text:p>102</text:p>
          </table:table-cell>
          <table:table-cell table:style-name="ce21" office:value-type="string" calcext:value-type="string">
            <text:p>2-21</text:p>
          </table:table-cell>
          <table:table-cell table:style-name="ce21" office:value-type="float" office:value="21" calcext:value-type="float">
            <text:p>21</text:p>
          </table:table-cell>
          <table:table-cell table:style-name="ce11" office:value-type="string" calcext:value-type="string">
            <text:p>ジェームズ＝ワット</text:p>
          </table:table-cell>
          <table:table-cell table:style-name="ce11" table:formula="of:=[.E154]" office:value-type="string" office:string-value="ジェームズ＝ワット" calcext:value-type="string">
            <text:p>ジェームズ＝ワット</text:p>
          </table:table-cell>
          <table:table-cell table:style-name="ce11" office:value-type="string" calcext:value-type="string">
            <text:p>じぇーむずわっと</text:p>
          </table:table-cell>
          <table:table-cell table:style-name="ce11" office:value-type="string" calcext:value-type="string">
            <text:p>第２弾ブースターパック</text:p>
          </table:table-cell>
          <table:table-cell table:style-name="ce11" table:formula="of:=VLOOKUP([.H154];[$収録番号.$A$1:$収録番号.$B$10];2;0)" office:value-type="float" office:value="25" calcext:value-type="float">
            <text:p>25</text:p>
          </table:table-cell>
          <table:table-cell table:style-name="ce11" office:value-type="string" calcext:value-type="string">
            <text:p>R</text:p>
          </table:table-cell>
          <table:table-cell table:style-name="ce11" table:formula="of:=VLOOKUP([.J15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4];[$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4];[$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54];[$特性番号.$A$1:$特性番号.$B$8];2;0);0)" office:value-type="float" office:value="0" calcext:value-type="float">
            <text:p>0</text:p>
          </table:table-cell>
          <table:table-cell table:style-name="ce11"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5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1.png</text:p>
          </table:table-cell>
          <table:table-cell table:style-name="ce11" table:formula="of:=CONCATENATE([$JSON.$A$1];[.$C154];[$JSON.$B$1];[.$E154];[$JSON.$C$1];[.F154];[$JSON.$D$1];[.$G154];[$JSON.$E$1];IF(ISNA([.$T154]);&quot;null&quot;;&quot;&quot;&quot;&quot;&amp;[.$T154]&amp;&quot;&quot;&quot;&quot;);[$JSON.$F$1];[.$V154];[$JSON.$G$1];IF(ISNA([.$X154]);&quot;null&quot;;&quot;&quot;&quot;&quot;&amp;[.$X154]&amp;&quot;&quot;&quot;&quot;);[$JSON.$H$1];[.$AA154];[$JSON.$I$1];[.$I154];[$JSON.$J$1];[.K154];[$JSON.$K$1];[.$M154];[$JSON.$L$1];[.$P154];[$JSON.$M$1];[.$O154];[$JSON.$N$1];[.$S154];[$JSON.$O$1];[.$U154];[$JSON.$P$1];IF(ISNA([.$W154]);&quot;null&quot;;[.$W154]);[$JSON.$Q$1];[.$Y154];[$JSON.$R$1];IF([.$Z154];&quot;true&quot;;&quot;false&quot;);[$JSON.$S$1];[.$A154];[$JSON.$T$1];[.$B154];[$JSON.$U$1])" office:value-type="string" office:string-value="{&quot;id&quot;:&quot;2-21&quot;,&quot;name&quot;:&quot;ジェームズ＝ワット&quot;,&quot;displayName&quot;:&quot;ジェームズ＝ワット&quot;,&quot;kana&quot;:&quot;じぇーむずわっと&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rarity&quot;:2,&quot;type&quot;:1,&quot;level&quot;:3,&quot;color&quot;:2,&quot;term&quot;:0,&quot;trait&quot;:0,&quot;power&quot;:500,&quot;legacy&quot;:6,&quot;anyNumCopies&quot;:false,&quot;orderTable&quot;:153,&quot;orderDeck&quot;:102}," calcext:value-type="string">
            <text:p>{"id":"2-21","name":"ジェームズ＝ワット","displayName":"ジェームズ＝ワット","kana":"じぇーむずわっと","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rarity":2,"type":1,"level":3,"color":2,"term":0,"trait":0,"power":500,"legacy":6,"anyNumCopies":false,"orderTable":153,"orderDeck":102},</text:p>
          </table:table-cell>
          <table:table-cell table:number-columns-repeated="16356"/>
        </table:table-row>
        <table:table-row table:style-name="ro2">
          <table:table-cell table:style-name="ce11" office:value-type="float" office:value="154" calcext:value-type="float">
            <text:p>154</text:p>
          </table:table-cell>
          <table:table-cell table:style-name="ce11" office:value-type="float" office:value="151" calcext:value-type="float">
            <text:p>151</text:p>
          </table:table-cell>
          <table:table-cell table:style-name="ce21" office:value-type="string" calcext:value-type="string">
            <text:p>2-22</text:p>
          </table:table-cell>
          <table:table-cell table:style-name="ce21" office:value-type="float" office:value="22" calcext:value-type="float">
            <text:p>22</text:p>
          </table:table-cell>
          <table:table-cell table:style-name="ce11" office:value-type="string" calcext:value-type="string">
            <text:p>日蓮</text:p>
          </table:table-cell>
          <table:table-cell table:style-name="ce11" table:formula="of:=[.E155]" office:value-type="string" office:string-value="日蓮" calcext:value-type="string">
            <text:p>日蓮</text:p>
          </table:table-cell>
          <table:table-cell table:style-name="ce11" office:value-type="string" calcext:value-type="string">
            <text:p>にちれん</text:p>
          </table:table-cell>
          <table:table-cell table:style-name="ce11" office:value-type="string" calcext:value-type="string">
            <text:p>第２弾ブースターパック</text:p>
          </table:table-cell>
          <table:table-cell table:style-name="ce11" table:formula="of:=VLOOKUP([.H155];[$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5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5];[$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5];[$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55];[$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155];[$特性番号.$A$1:$特性番号.$B$8];2;0);0)" office:value-type="float" office:value="0" calcext:value-type="float">
            <text:p>0</text:p>
          </table:table-cell>
          <table:table-cell table:style-name="ce11"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2.png</text:p>
          </table:table-cell>
          <table:table-cell table:style-name="ce11" table:formula="of:=CONCATENATE([$JSON.$A$1];[.$C155];[$JSON.$B$1];[.$E155];[$JSON.$C$1];[.F155];[$JSON.$D$1];[.$G155];[$JSON.$E$1];IF(ISNA([.$T155]);&quot;null&quot;;&quot;&quot;&quot;&quot;&amp;[.$T155]&amp;&quot;&quot;&quot;&quot;);[$JSON.$F$1];[.$V155];[$JSON.$G$1];IF(ISNA([.$X155]);&quot;null&quot;;&quot;&quot;&quot;&quot;&amp;[.$X155]&amp;&quot;&quot;&quot;&quot;);[$JSON.$H$1];[.$AA155];[$JSON.$I$1];[.$I155];[$JSON.$J$1];[.K155];[$JSON.$K$1];[.$M155];[$JSON.$L$1];[.$P155];[$JSON.$M$1];[.$O155];[$JSON.$N$1];[.$S155];[$JSON.$O$1];[.$U155];[$JSON.$P$1];IF(ISNA([.$W155]);&quot;null&quot;;[.$W155]);[$JSON.$Q$1];[.$Y155];[$JSON.$R$1];IF([.$Z155];&quot;true&quot;;&quot;false&quot;);[$JSON.$S$1];[.$A155];[$JSON.$T$1];[.$B155];[$JSON.$U$1])" office:value-type="string" office:string-value="{&quot;id&quot;:&quot;2-22&quot;,&quot;name&quot;:&quot;日蓮&quot;,&quot;displayName&quot;:&quot;日蓮&quot;,&quot;kana&quot;:&quot;にちれん&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rarity&quot;:1,&quot;type&quot;:1,&quot;level&quot;:4,&quot;color&quot;:2,&quot;term&quot;:1,&quot;trait&quot;:0,&quot;power&quot;:3000,&quot;legacy&quot;:0,&quot;anyNumCopies&quot;:false,&quot;orderTable&quot;:154,&quot;orderDeck&quot;:151}," calcext:value-type="string">
            <text:p>{"id":"2-22","name":"日蓮","displayName":"日蓮","kana":"にちれん","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rarity":1,"type":1,"level":4,"color":2,"term":1,"trait":0,"power":3000,"legacy":0,"anyNumCopies":false,"orderTable":154,"orderDeck":151},</text:p>
          </table:table-cell>
          <table:table-cell table:number-columns-repeated="16356"/>
        </table:table-row>
        <table:table-row table:style-name="ro2">
          <table:table-cell table:style-name="ce11" office:value-type="float" office:value="155" calcext:value-type="float">
            <text:p>155</text:p>
          </table:table-cell>
          <table:table-cell table:style-name="ce11" office:value-type="float" office:value="261" calcext:value-type="float">
            <text:p>261</text:p>
          </table:table-cell>
          <table:table-cell table:style-name="ce21" office:value-type="string" calcext:value-type="string">
            <text:p>2-23</text:p>
          </table:table-cell>
          <table:table-cell table:style-name="ce21" office:value-type="float" office:value="23" calcext:value-type="float">
            <text:p>23</text:p>
          </table:table-cell>
          <table:table-cell table:style-name="ce11" office:value-type="string" calcext:value-type="string">
            <text:p>李舜臣</text:p>
          </table:table-cell>
          <table:table-cell table:style-name="ce11" table:formula="of:=[.E156]" office:value-type="string" office:string-value="李舜臣" calcext:value-type="string">
            <text:p>李舜臣</text:p>
          </table:table-cell>
          <table:table-cell table:style-name="ce11" office:value-type="string" calcext:value-type="string">
            <text:p>りしゅんしん</text:p>
          </table:table-cell>
          <table:table-cell table:style-name="ce11" office:value-type="string" calcext:value-type="string">
            <text:p>第２弾ブースターパック</text:p>
          </table:table-cell>
          <table:table-cell table:style-name="ce11" table:formula="of:=VLOOKUP([.H156];[$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5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6];[$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6];[$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56];[$特性番号.$A$1:$特性番号.$B$8];2;0);0)" office:value-type="float" office:value="0" calcext:value-type="float">
            <text:p>0</text:p>
          </table:table-cell>
          <table:table-cell table:style-name="ce11" office:value-type="string" calcext:value-type="string">
            <text:p>ウォッチャー¶「即応」を持つイジンが相手の戦場にいる間「ブロック+4000」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5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3.png</text:p>
          </table:table-cell>
          <table:table-cell table:style-name="ce11" table:formula="of:=CONCATENATE([$JSON.$A$1];[.$C156];[$JSON.$B$1];[.$E156];[$JSON.$C$1];[.F156];[$JSON.$D$1];[.$G156];[$JSON.$E$1];IF(ISNA([.$T156]);&quot;null&quot;;&quot;&quot;&quot;&quot;&amp;[.$T156]&amp;&quot;&quot;&quot;&quot;);[$JSON.$F$1];[.$V156];[$JSON.$G$1];IF(ISNA([.$X156]);&quot;null&quot;;&quot;&quot;&quot;&quot;&amp;[.$X156]&amp;&quot;&quot;&quot;&quot;);[$JSON.$H$1];[.$AA156];[$JSON.$I$1];[.$I156];[$JSON.$J$1];[.K156];[$JSON.$K$1];[.$M156];[$JSON.$L$1];[.$P156];[$JSON.$M$1];[.$O156];[$JSON.$N$1];[.$S156];[$JSON.$O$1];[.$U156];[$JSON.$P$1];IF(ISNA([.$W156]);&quot;null&quot;;[.$W156]);[$JSON.$Q$1];[.$Y156];[$JSON.$R$1];IF([.$Z156];&quot;true&quot;;&quot;false&quot;);[$JSON.$S$1];[.$A156];[$JSON.$T$1];[.$B156];[$JSON.$U$1])" office:value-type="string" office:string-value="{&quot;id&quot;:&quot;2-23&quot;,&quot;name&quot;:&quot;李舜臣&quot;,&quot;displayName&quot;:&quot;李舜臣&quot;,&quot;kana&quot;:&quot;りしゅんしん&quot;,&quot;traitText&quot;:null,&quot;ruleText&quot;:&quot;ウォッチャー¶「即応」を持つイジンが相手の戦場にいる間「ブロック+4000」を得る。&quot;,&quot;legacyText&quot;:null,&quot;imageUrl&quot;:&quot;https://one-draw.jp/ijinden/cardlist/002/card/02_023.png&quot;,&quot;expansion&quot;:25,&quot;rarity&quot;:1,&quot;type&quot;:1,&quot;level&quot;:7,&quot;color&quot;:2,&quot;term&quot;:0,&quot;trait&quot;:0,&quot;power&quot;:7000,&quot;legacy&quot;:0,&quot;anyNumCopies&quot;:false,&quot;orderTable&quot;:155,&quot;orderDeck&quot;:261}," calcext:value-type="string">
            <text:p>{"id":"2-23","name":"李舜臣","displayName":"李舜臣","kana":"りしゅんしん","traitText":null,"ruleText":"ウォッチャー¶「即応」を持つイジンが相手の戦場にいる間「ブロック+4000」を得る。","legacyText":null,"imageUrl":"https://one-draw.jp/ijinden/cardlist/002/card/02_023.png","expansion":25,"rarity":1,"type":1,"level":7,"color":2,"term":0,"trait":0,"power":7000,"legacy":0,"anyNumCopies":false,"orderTable":155,"orderDeck":261},</text:p>
          </table:table-cell>
          <table:table-cell table:number-columns-repeated="16356"/>
        </table:table-row>
        <table:table-row table:style-name="ro2">
          <table:table-cell table:style-name="ce11" office:value-type="float" office:value="156" calcext:value-type="float">
            <text:p>156</text:p>
          </table:table-cell>
          <table:table-cell table:style-name="ce11" office:value-type="float" office:value="200" calcext:value-type="float">
            <text:p>200</text:p>
          </table:table-cell>
          <table:table-cell table:style-name="ce21" office:value-type="string" calcext:value-type="string">
            <text:p>2-24</text:p>
          </table:table-cell>
          <table:table-cell table:style-name="ce21" office:value-type="float" office:value="24" calcext:value-type="float">
            <text:p>24</text:p>
          </table:table-cell>
          <table:table-cell table:style-name="ce11" office:value-type="string" calcext:value-type="string">
            <text:p>山田長政</text:p>
          </table:table-cell>
          <table:table-cell table:style-name="ce11" table:formula="of:=[.E157]" office:value-type="string" office:string-value="山田長政" calcext:value-type="string">
            <text:p>山田長政</text:p>
          </table:table-cell>
          <table:table-cell table:style-name="ce11" office:value-type="string" calcext:value-type="string">
            <text:p>やまだながまさ</text:p>
          </table:table-cell>
          <table:table-cell table:style-name="ce11" office:value-type="string" calcext:value-type="string">
            <text:p>第２弾ブースターパック</text:p>
          </table:table-cell>
          <table:table-cell table:style-name="ce11" table:formula="of:=VLOOKUP([.H157];[$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7];[$種類番号.$A$1:$種類番号.$B$4];2;0)" office:value-type="float" office:value="1" calcext:value-type="float">
            <text:p>1</text:p>
          </table:table-cell>
          <table:table-cell table:style-name="ce11" office:value-type="string" calcext:value-type="string">
            <text:p>青</text:p>
          </table:table-cell>
          <table:table-cell table:style-name="ce11" table:formula="of:=VLOOKUP([.N157];[$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157];[$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157];[$特性番号.$A$1:$特性番号.$B$8];2;0);0)" office:value-type="float" office:value="0" calcext:value-type="float">
            <text:p>0</text:p>
          </table:table-cell>
          <table:table-cell table:style-name="ce11" office:value-type="string" calcext:value-type="string">
            <text:p>航海 - アタッカーになったとき、相手の戦場のイジン1体を指定して発動できる。次のブロックステップに際し、そのイジンは、これをブロックする。</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15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4.png</text:p>
          </table:table-cell>
          <table:table-cell table:style-name="ce11" table:formula="of:=CONCATENATE([$JSON.$A$1];[.$C157];[$JSON.$B$1];[.$E157];[$JSON.$C$1];[.F157];[$JSON.$D$1];[.$G157];[$JSON.$E$1];IF(ISNA([.$T157]);&quot;null&quot;;&quot;&quot;&quot;&quot;&amp;[.$T157]&amp;&quot;&quot;&quot;&quot;);[$JSON.$F$1];[.$V157];[$JSON.$G$1];IF(ISNA([.$X157]);&quot;null&quot;;&quot;&quot;&quot;&quot;&amp;[.$X157]&amp;&quot;&quot;&quot;&quot;);[$JSON.$H$1];[.$AA157];[$JSON.$I$1];[.$I157];[$JSON.$J$1];[.K157];[$JSON.$K$1];[.$M157];[$JSON.$L$1];[.$P157];[$JSON.$M$1];[.$O157];[$JSON.$N$1];[.$S157];[$JSON.$O$1];[.$U157];[$JSON.$P$1];IF(ISNA([.$W157]);&quot;null&quot;;[.$W157]);[$JSON.$Q$1];[.$Y157];[$JSON.$R$1];IF([.$Z157];&quot;true&quot;;&quot;false&quot;);[$JSON.$S$1];[.$A157];[$JSON.$T$1];[.$B157];[$JSON.$U$1])" office:value-type="string" office:string-value="{&quot;id&quot;:&quot;2-24&quot;,&quot;name&quot;:&quot;山田長政&quot;,&quot;displayName&quot;:&quot;山田長政&quot;,&quot;kana&quot;:&quot;やまだながまさ&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rarity&quot;:1,&quot;type&quot;:1,&quot;level&quot;:5,&quot;color&quot;:2,&quot;term&quot;:1,&quot;trait&quot;:0,&quot;power&quot;:4000,&quot;legacy&quot;:4,&quot;anyNumCopies&quot;:false,&quot;orderTable&quot;:156,&quot;orderDeck&quot;:200}," calcext:value-type="string">
            <text:p>{"id":"2-24","name":"山田長政","displayName":"山田長政","kana":"やまだながまさ","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rarity":1,"type":1,"level":5,"color":2,"term":1,"trait":0,"power":4000,"legacy":4,"anyNumCopies":false,"orderTable":156,"orderDeck":200},</text:p>
          </table:table-cell>
          <table:table-cell table:number-columns-repeated="16356"/>
        </table:table-row>
        <table:table-row table:style-name="ro2">
          <table:table-cell table:style-name="ce11" office:value-type="float" office:value="157" calcext:value-type="float">
            <text:p>157</text:p>
          </table:table-cell>
          <table:table-cell table:style-name="ce11" office:value-type="float" office:value="245" calcext:value-type="float">
            <text:p>245</text:p>
          </table:table-cell>
          <table:table-cell table:style-name="ce21" office:value-type="string" calcext:value-type="string">
            <text:p>2-25</text:p>
          </table:table-cell>
          <table:table-cell table:style-name="ce21" office:value-type="float" office:value="25" calcext:value-type="float">
            <text:p>25</text:p>
          </table:table-cell>
          <table:table-cell table:style-name="ce11" office:value-type="string" calcext:value-type="string">
            <text:p>運慶</text:p>
          </table:table-cell>
          <table:table-cell table:style-name="ce11" table:formula="of:=[.E158]" office:value-type="string" office:string-value="運慶" calcext:value-type="string">
            <text:p>運慶</text:p>
          </table:table-cell>
          <table:table-cell table:style-name="ce11" office:value-type="string" calcext:value-type="string">
            <text:p>うんけい</text:p>
          </table:table-cell>
          <table:table-cell table:style-name="ce11" office:value-type="string" calcext:value-type="string">
            <text:p>第２弾ブースターパック</text:p>
          </table:table-cell>
          <table:table-cell table:style-name="ce11" table:formula="of:=VLOOKUP([.H158];[$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58];[$種類番号.$A$1:$種類番号.$B$4];2;0)" office:value-type="float" office:value="1" calcext:value-type="float">
            <text:p>1</text:p>
          </table:table-cell>
          <table:table-cell table:style-name="ce11" office:value-type="string" calcext:value-type="string">
            <text:p>緑</text:p>
          </table:table-cell>
          <table:table-cell table:style-name="ce11" table:formula="of:=VLOOKUP([.N158];[$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5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58];[$特性番号.$A$1:$特性番号.$B$8];2;0);0)" office:value-type="float" office:value="0" calcext:value-type="float">
            <text:p>0</text:p>
          </table:table-cell>
          <table:table-cell table:style-name="ce11" office:value-type="string" calcext:value-type="string">
            <text:p>戦場に置かれたとき、自分の戦場のハイケイ1つにつき1ドローする。¶自分の戦場のハイケイ1つにつき「パワー+500」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15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5.png</text:p>
          </table:table-cell>
          <table:table-cell table:style-name="ce11" table:formula="of:=CONCATENATE([$JSON.$A$1];[.$C158];[$JSON.$B$1];[.$E158];[$JSON.$C$1];[.F158];[$JSON.$D$1];[.$G158];[$JSON.$E$1];IF(ISNA([.$T158]);&quot;null&quot;;&quot;&quot;&quot;&quot;&amp;[.$T158]&amp;&quot;&quot;&quot;&quot;);[$JSON.$F$1];[.$V158];[$JSON.$G$1];IF(ISNA([.$X158]);&quot;null&quot;;&quot;&quot;&quot;&quot;&amp;[.$X158]&amp;&quot;&quot;&quot;&quot;);[$JSON.$H$1];[.$AA158];[$JSON.$I$1];[.$I158];[$JSON.$J$1];[.K158];[$JSON.$K$1];[.$M158];[$JSON.$L$1];[.$P158];[$JSON.$M$1];[.$O158];[$JSON.$N$1];[.$S158];[$JSON.$O$1];[.$U158];[$JSON.$P$1];IF(ISNA([.$W158]);&quot;null&quot;;[.$W158]);[$JSON.$Q$1];[.$Y158];[$JSON.$R$1];IF([.$Z158];&quot;true&quot;;&quot;false&quot;);[$JSON.$S$1];[.$A158];[$JSON.$T$1];[.$B158];[$JSON.$U$1])" office:value-type="string" office:string-value="{&quot;id&quot;:&quot;2-25&quot;,&quot;name&quot;:&quot;運慶&quot;,&quot;displayName&quot;:&quot;運慶&quot;,&quot;kana&quot;:&quot;うんけい&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rarity&quot;:1,&quot;type&quot;:1,&quot;level&quot;:6,&quot;color&quot;:4,&quot;term&quot;:0,&quot;trait&quot;:0,&quot;power&quot;:5000,&quot;legacy&quot;:0,&quot;anyNumCopies&quot;:false,&quot;orderTable&quot;:157,&quot;orderDeck&quot;:245}," calcext:value-type="string">
            <text:p>{"id":"2-25","name":"運慶","displayName":"運慶","kana":"うんけい","traitText":null,"ruleText":"戦場に置かれたとき、自分の戦場のハイケイ1つにつき1ドローする。¶自分の戦場のハイケイ1つにつき「パワー+500」を得る。","legacyText":null,"imageUrl":"https://one-draw.jp/ijinden/cardlist/002/card/02_025.png","expansion":25,"rarity":1,"type":1,"level":6,"color":4,"term":0,"trait":0,"power":5000,"legacy":0,"anyNumCopies":false,"orderTable":157,"orderDeck":245},</text:p>
          </table:table-cell>
          <table:table-cell table:number-columns-repeated="16356"/>
        </table:table-row>
        <table:table-row table:style-name="ro2">
          <table:table-cell table:style-name="ce11" office:value-type="float" office:value="158" calcext:value-type="float">
            <text:p>158</text:p>
          </table:table-cell>
          <table:table-cell table:style-name="ce11" office:value-type="float" office:value="59" calcext:value-type="float">
            <text:p>59</text:p>
          </table:table-cell>
          <table:table-cell table:style-name="ce21" office:value-type="string" calcext:value-type="string">
            <text:p>2-26</text:p>
          </table:table-cell>
          <table:table-cell table:style-name="ce21" office:value-type="float" office:value="26" calcext:value-type="float">
            <text:p>26</text:p>
          </table:table-cell>
          <table:table-cell table:style-name="ce11" office:value-type="string" calcext:value-type="string">
            <text:p>ハリエット・ビーチャー・ストウ</text:p>
          </table:table-cell>
          <table:table-cell table:style-name="ce11" table:formula="of:=[.E159]" office:value-type="string" office:string-value="ハリエット・ビーチャー・ストウ" calcext:value-type="string">
            <text:p>ハリエット・ビーチャー・ストウ</text:p>
          </table:table-cell>
          <table:table-cell table:style-name="ce11" office:value-type="string" calcext:value-type="string">
            <text:p>はりえっとびーちゃーすとう</text:p>
          </table:table-cell>
          <table:table-cell table:style-name="ce11" office:value-type="string" calcext:value-type="string">
            <text:p>第２弾ブースターパック</text:p>
          </table:table-cell>
          <table:table-cell table:style-name="ce11" table:formula="of:=VLOOKUP([.H159];[$収録番号.$A$1:$収録番号.$B$10];2;0)" office:value-type="float" office:value="25" calcext:value-type="float">
            <text:p>25</text:p>
          </table:table-cell>
          <table:table-cell table:style-name="ce11" office:value-type="string" calcext:value-type="string">
            <text:p>R</text:p>
          </table:table-cell>
          <table:table-cell table:style-name="ce11" table:formula="of:=VLOOKUP([.J15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59];[$種類番号.$A$1:$種類番号.$B$4];2;0)" office:value-type="float" office:value="1" calcext:value-type="float">
            <text:p>1</text:p>
          </table:table-cell>
          <table:table-cell table:style-name="ce11" office:value-type="string" calcext:value-type="string">
            <text:p>緑</text:p>
          </table:table-cell>
          <table:table-cell table:style-name="ce11" table:formula="of:=VLOOKUP([.N15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59];[$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159];[$特性番号.$A$1:$特性番号.$B$8];2;0);0)" office:value-type="float" office:value="0" calcext:value-type="float">
            <text:p>0</text:p>
          </table:table-cell>
          <table:table-cell table:style-name="ce11"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5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6.png</text:p>
          </table:table-cell>
          <table:table-cell table:style-name="ce11" table:formula="of:=CONCATENATE([$JSON.$A$1];[.$C159];[$JSON.$B$1];[.$E159];[$JSON.$C$1];[.F159];[$JSON.$D$1];[.$G159];[$JSON.$E$1];IF(ISNA([.$T159]);&quot;null&quot;;&quot;&quot;&quot;&quot;&amp;[.$T159]&amp;&quot;&quot;&quot;&quot;);[$JSON.$F$1];[.$V159];[$JSON.$G$1];IF(ISNA([.$X159]);&quot;null&quot;;&quot;&quot;&quot;&quot;&amp;[.$X159]&amp;&quot;&quot;&quot;&quot;);[$JSON.$H$1];[.$AA159];[$JSON.$I$1];[.$I159];[$JSON.$J$1];[.K159];[$JSON.$K$1];[.$M159];[$JSON.$L$1];[.$P159];[$JSON.$M$1];[.$O159];[$JSON.$N$1];[.$S159];[$JSON.$O$1];[.$U159];[$JSON.$P$1];IF(ISNA([.$W159]);&quot;null&quot;;[.$W159]);[$JSON.$Q$1];[.$Y159];[$JSON.$R$1];IF([.$Z159];&quot;true&quot;;&quot;false&quot;);[$JSON.$S$1];[.$A159];[$JSON.$T$1];[.$B159];[$JSON.$U$1])" office:value-type="string" office:string-value="{&quot;id&quot;:&quot;2-26&quot;,&quot;name&quot;:&quot;ハリエット・ビーチャー・ストウ&quot;,&quot;displayName&quot;:&quot;ハリエット・ビーチャー・ストウ&quot;,&quot;kana&quot;:&quot;はりえっとびーちゃーすとう&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rarity&quot;:2,&quot;type&quot;:1,&quot;level&quot;:2,&quot;color&quot;:4,&quot;term&quot;:2,&quot;trait&quot;:0,&quot;power&quot;:1000,&quot;legacy&quot;:4,&quot;anyNumCopies&quot;:false,&quot;orderTable&quot;:158,&quot;orderDeck&quot;:59}," calcext:value-type="string">
            <text:p>{"id":"2-26","name":"ハリエット・ビーチャー・ストウ","displayName":"ハリエット・ビーチャー・ストウ","kana":"はりえっとびーちゃーすとう","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rarity":2,"type":1,"level":2,"color":4,"term":2,"trait":0,"power":1000,"legacy":4,"anyNumCopies":false,"orderTable":158,"orderDeck":59},</text:p>
          </table:table-cell>
          <table:table-cell table:number-columns-repeated="16356"/>
        </table:table-row>
        <table:table-row table:style-name="ro2">
          <table:table-cell table:style-name="ce11" office:value-type="float" office:value="159" calcext:value-type="float">
            <text:p>159</text:p>
          </table:table-cell>
          <table:table-cell table:style-name="ce11" office:value-type="float" office:value="112" calcext:value-type="float">
            <text:p>112</text:p>
          </table:table-cell>
          <table:table-cell table:style-name="ce21" office:value-type="string" calcext:value-type="string">
            <text:p>2-27</text:p>
          </table:table-cell>
          <table:table-cell table:style-name="ce21" office:value-type="float" office:value="27" calcext:value-type="float">
            <text:p>27</text:p>
          </table:table-cell>
          <table:table-cell table:style-name="ce11" office:value-type="string" calcext:value-type="string">
            <text:p>コシャマイン</text:p>
          </table:table-cell>
          <table:table-cell table:style-name="ce11" table:formula="of:=[.E160]" office:value-type="string" office:string-value="コシャマイン" calcext:value-type="string">
            <text:p>コシャマイン</text:p>
          </table:table-cell>
          <table:table-cell table:style-name="ce11" office:value-type="string" calcext:value-type="string">
            <text:p>こしゃまいん</text:p>
          </table:table-cell>
          <table:table-cell table:style-name="ce11" office:value-type="string" calcext:value-type="string">
            <text:p>第２弾ブースターパック</text:p>
          </table:table-cell>
          <table:table-cell table:style-name="ce11" table:formula="of:=VLOOKUP([.H160];[$収録番号.$A$1:$収録番号.$B$10];2;0)" office:value-type="float" office:value="25" calcext:value-type="float">
            <text:p>25</text:p>
          </table:table-cell>
          <table:table-cell table:style-name="ce11" office:value-type="string" calcext:value-type="string">
            <text:p>R</text:p>
          </table:table-cell>
          <table:table-cell table:style-name="ce11" table:formula="of:=VLOOKUP([.J16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60];[$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0];[$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60];[$能力語番号.$A$1:$能力語番号.$B$11];2;0);0)" office:value-type="float" office:value="4" calcext:value-type="float">
            <text:p>4</text:p>
          </table:table-cell>
          <table:table-cell table:formula="of:=NA()" office:value-type="string" office:string-value="" calcext:value-type="error">
            <text:p>#N/A</text:p>
          </table:table-cell>
          <table:table-cell table:style-name="ce11" table:formula="of:=IFERROR(VLOOKUP([.$T160];[$特性番号.$A$1:$特性番号.$B$8];2;0);0)" office:value-type="float" office:value="0" calcext:value-type="float">
            <text:p>0</text:p>
          </table:table-cell>
          <table:table-cell table:style-name="ce11"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160];[$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7.png</text:p>
          </table:table-cell>
          <table:table-cell table:style-name="ce11" table:formula="of:=CONCATENATE([$JSON.$A$1];[.$C160];[$JSON.$B$1];[.$E160];[$JSON.$C$1];[.F160];[$JSON.$D$1];[.$G160];[$JSON.$E$1];IF(ISNA([.$T160]);&quot;null&quot;;&quot;&quot;&quot;&quot;&amp;[.$T160]&amp;&quot;&quot;&quot;&quot;);[$JSON.$F$1];[.$V160];[$JSON.$G$1];IF(ISNA([.$X160]);&quot;null&quot;;&quot;&quot;&quot;&quot;&amp;[.$X160]&amp;&quot;&quot;&quot;&quot;);[$JSON.$H$1];[.$AA160];[$JSON.$I$1];[.$I160];[$JSON.$J$1];[.K160];[$JSON.$K$1];[.$M160];[$JSON.$L$1];[.$P160];[$JSON.$M$1];[.$O160];[$JSON.$N$1];[.$S160];[$JSON.$O$1];[.$U160];[$JSON.$P$1];IF(ISNA([.$W160]);&quot;null&quot;;[.$W160]);[$JSON.$Q$1];[.$Y160];[$JSON.$R$1];IF([.$Z160];&quot;true&quot;;&quot;false&quot;);[$JSON.$S$1];[.$A160];[$JSON.$T$1];[.$B160];[$JSON.$U$1])" office:value-type="string" office:string-value="{&quot;id&quot;:&quot;2-27&quot;,&quot;name&quot;:&quot;コシャマイン&quot;,&quot;displayName&quot;:&quot;コシャマイン&quot;,&quot;kana&quot;:&quot;こしゃまいん&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rarity&quot;:2,&quot;type&quot;:1,&quot;level&quot;:3,&quot;color&quot;:4,&quot;term&quot;:4,&quot;trait&quot;:0,&quot;power&quot;:2000,&quot;legacy&quot;:6,&quot;anyNumCopies&quot;:false,&quot;orderTable&quot;:159,&quot;orderDeck&quot;:112}," calcext:value-type="string">
            <text:p>{"id":"2-27","name":"コシャマイン","displayName":"コシャマイン","kana":"こしゃまいん","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rarity":2,"type":1,"level":3,"color":4,"term":4,"trait":0,"power":2000,"legacy":6,"anyNumCopies":false,"orderTable":159,"orderDeck":112},</text:p>
          </table:table-cell>
          <table:table-cell table:number-columns-repeated="16356"/>
        </table:table-row>
        <table:table-row table:style-name="ro2">
          <table:table-cell table:style-name="ce11" office:value-type="float" office:value="160" calcext:value-type="float">
            <text:p>160</text:p>
          </table:table-cell>
          <table:table-cell table:style-name="ce11" office:value-type="float" office:value="267" calcext:value-type="float">
            <text:p>267</text:p>
          </table:table-cell>
          <table:table-cell table:style-name="ce21" office:value-type="string" calcext:value-type="string">
            <text:p>2-28</text:p>
          </table:table-cell>
          <table:table-cell table:style-name="ce21" office:value-type="float" office:value="28" calcext:value-type="float">
            <text:p>28</text:p>
          </table:table-cell>
          <table:table-cell table:style-name="ce11" office:value-type="string" calcext:value-type="string">
            <text:p>狩野山楽</text:p>
          </table:table-cell>
          <table:table-cell table:style-name="ce11" table:formula="of:=[.E161]" office:value-type="string" office:string-value="狩野山楽" calcext:value-type="string">
            <text:p>狩野山楽</text:p>
          </table:table-cell>
          <table:table-cell table:style-name="ce11" office:value-type="string" calcext:value-type="string">
            <text:p>かのうさんらく</text:p>
          </table:table-cell>
          <table:table-cell table:style-name="ce11" office:value-type="string" calcext:value-type="string">
            <text:p>第２弾ブースターパック</text:p>
          </table:table-cell>
          <table:table-cell table:style-name="ce11" table:formula="of:=VLOOKUP([.H161];[$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1];[$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1];[$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1];[$能力語番号.$A$1:$能力語番号.$B$11];2;0);0)" office:value-type="float" office:value="0" calcext:value-type="float">
            <text:p>0</text:p>
          </table:table-cell>
          <table:table-cell office:value-type="string" calcext:value-type="string">
            <text:p>美術</text:p>
          </table:table-cell>
          <table:table-cell table:style-name="ce11" table:formula="of:=IFERROR(VLOOKUP([.$T161];[$特性番号.$A$1:$特性番号.$B$8];2;0);0)" office:value-type="float" office:value="2" calcext:value-type="float">
            <text:p>2</text:p>
          </table:table-cell>
          <table:table-cell table:style-name="ce11" office:value-type="string" calcext:value-type="string">
            <text:p>戦場に置かれたとき、赤のイジンが戦場にいるなら発動する。1ドローして、イジン召喚権+1する。</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16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8.png</text:p>
          </table:table-cell>
          <table:table-cell table:style-name="ce11" table:formula="of:=CONCATENATE([$JSON.$A$1];[.$C161];[$JSON.$B$1];[.$E161];[$JSON.$C$1];[.F161];[$JSON.$D$1];[.$G161];[$JSON.$E$1];IF(ISNA([.$T161]);&quot;null&quot;;&quot;&quot;&quot;&quot;&amp;[.$T161]&amp;&quot;&quot;&quot;&quot;);[$JSON.$F$1];[.$V161];[$JSON.$G$1];IF(ISNA([.$X161]);&quot;null&quot;;&quot;&quot;&quot;&quot;&amp;[.$X161]&amp;&quot;&quot;&quot;&quot;);[$JSON.$H$1];[.$AA161];[$JSON.$I$1];[.$I161];[$JSON.$J$1];[.K161];[$JSON.$K$1];[.$M161];[$JSON.$L$1];[.$P161];[$JSON.$M$1];[.$O161];[$JSON.$N$1];[.$S161];[$JSON.$O$1];[.$U161];[$JSON.$P$1];IF(ISNA([.$W161]);&quot;null&quot;;[.$W161]);[$JSON.$Q$1];[.$Y161];[$JSON.$R$1];IF([.$Z161];&quot;true&quot;;&quot;false&quot;);[$JSON.$S$1];[.$A161];[$JSON.$T$1];[.$B161];[$JSON.$U$1])" office:value-type="string" office:string-value="{&quot;id&quot;:&quot;2-28&quot;,&quot;name&quot;:&quot;狩野山楽&quot;,&quot;displayName&quot;:&quot;狩野山楽&quot;,&quot;kana&quot;:&quot;かのうさんらく&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rarity&quot;:1,&quot;type&quot;:1,&quot;level&quot;:7,&quot;color&quot;:4,&quot;term&quot;:0,&quot;trait&quot;:2,&quot;power&quot;:5000,&quot;legacy&quot;:4,&quot;anyNumCopies&quot;:false,&quot;orderTable&quot;:160,&quot;orderDeck&quot;:267}," calcext:value-type="string">
            <text:p>{"id":"2-28","name":"狩野山楽","displayName":"狩野山楽","kana":"かのうさんらく","traitText":"美術","ruleText":"戦場に置かれたとき、赤のイジンが戦場にいるなら発動する。1ドローして、イジン召喚権+1する。","legacyText":"1ドローする","imageUrl":"https://one-draw.jp/ijinden/cardlist/002/card/02_028.png","expansion":25,"rarity":1,"type":1,"level":7,"color":4,"term":0,"trait":2,"power":5000,"legacy":4,"anyNumCopies":false,"orderTable":160,"orderDeck":267},</text:p>
          </table:table-cell>
          <table:table-cell table:number-columns-repeated="16356"/>
        </table:table-row>
        <table:table-row table:style-name="ro2">
          <table:table-cell table:style-name="ce11" office:value-type="float" office:value="161" calcext:value-type="float">
            <text:p>161</text:p>
          </table:table-cell>
          <table:table-cell table:style-name="ce11" office:value-type="float" office:value="160" calcext:value-type="float">
            <text:p>160</text:p>
          </table:table-cell>
          <table:table-cell table:style-name="ce21" office:value-type="string" calcext:value-type="string">
            <text:p>2-29</text:p>
          </table:table-cell>
          <table:table-cell table:style-name="ce21" office:value-type="float" office:value="29" calcext:value-type="float">
            <text:p>29</text:p>
          </table:table-cell>
          <table:table-cell table:style-name="ce11" office:value-type="string" calcext:value-type="string">
            <text:p>徳川家光</text:p>
          </table:table-cell>
          <table:table-cell table:style-name="ce11" table:formula="of:=[.E162]" office:value-type="string" office:string-value="徳川家光" calcext:value-type="string">
            <text:p>徳川家光</text:p>
          </table:table-cell>
          <table:table-cell table:style-name="ce11" office:value-type="string" calcext:value-type="string">
            <text:p>とくがわいえみつ</text:p>
          </table:table-cell>
          <table:table-cell table:style-name="ce11" office:value-type="string" calcext:value-type="string">
            <text:p>第２弾ブースターパック</text:p>
          </table:table-cell>
          <table:table-cell table:style-name="ce11" table:formula="of:=VLOOKUP([.H162];[$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2];[$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2];[$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62];[$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発動できる。自分の戦場にある色1つにつきイジン召喚権+1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29.png</text:p>
          </table:table-cell>
          <table:table-cell table:style-name="ce11" table:formula="of:=CONCATENATE([$JSON.$A$1];[.$C162];[$JSON.$B$1];[.$E162];[$JSON.$C$1];[.F162];[$JSON.$D$1];[.$G162];[$JSON.$E$1];IF(ISNA([.$T162]);&quot;null&quot;;&quot;&quot;&quot;&quot;&amp;[.$T162]&amp;&quot;&quot;&quot;&quot;);[$JSON.$F$1];[.$V162];[$JSON.$G$1];IF(ISNA([.$X162]);&quot;null&quot;;&quot;&quot;&quot;&quot;&amp;[.$X162]&amp;&quot;&quot;&quot;&quot;);[$JSON.$H$1];[.$AA162];[$JSON.$I$1];[.$I162];[$JSON.$J$1];[.K162];[$JSON.$K$1];[.$M162];[$JSON.$L$1];[.$P162];[$JSON.$M$1];[.$O162];[$JSON.$N$1];[.$S162];[$JSON.$O$1];[.$U162];[$JSON.$P$1];IF(ISNA([.$W162]);&quot;null&quot;;[.$W162]);[$JSON.$Q$1];[.$Y162];[$JSON.$R$1];IF([.$Z162];&quot;true&quot;;&quot;false&quot;);[$JSON.$S$1];[.$A162];[$JSON.$T$1];[.$B162];[$JSON.$U$1])" office:value-type="string" office:string-value="{&quot;id&quot;:&quot;2-29&quot;,&quot;name&quot;:&quot;徳川家光&quot;,&quot;displayName&quot;:&quot;徳川家光&quot;,&quot;kana&quot;:&quot;とくがわいえみつ&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rarity&quot;:1,&quot;type&quot;:1,&quot;level&quot;:4,&quot;color&quot;:4,&quot;term&quot;:0,&quot;trait&quot;:0,&quot;power&quot;:1000,&quot;legacy&quot;:4,&quot;anyNumCopies&quot;:false,&quot;orderTable&quot;:161,&quot;orderDeck&quot;:160}," calcext:value-type="string">
            <text:p>{"id":"2-29","name":"徳川家光","displayName":"徳川家光","kana":"とくがわいえみつ","traitText":null,"ruleText":"戦場に置かれたとき、自分の魔力ゾーンのマリョク1つを裏にして発動できる。自分の戦場にある色1つにつきイジン召喚権+1する。","legacyText":"1ドローする","imageUrl":"https://one-draw.jp/ijinden/cardlist/002/card/02_029.png","expansion":25,"rarity":1,"type":1,"level":4,"color":4,"term":0,"trait":0,"power":1000,"legacy":4,"anyNumCopies":false,"orderTable":161,"orderDeck":160},</text:p>
          </table:table-cell>
          <table:table-cell table:number-columns-repeated="16356"/>
        </table:table-row>
        <table:table-row table:style-name="ro2">
          <table:table-cell table:style-name="ce11" office:value-type="float" office:value="162" calcext:value-type="float">
            <text:p>162</text:p>
          </table:table-cell>
          <table:table-cell table:style-name="ce11" office:value-type="float" office:value="210" calcext:value-type="float">
            <text:p>210</text:p>
          </table:table-cell>
          <table:table-cell table:style-name="ce21" office:value-type="string" calcext:value-type="string">
            <text:p>2-30</text:p>
          </table:table-cell>
          <table:table-cell table:style-name="ce21" office:value-type="float" office:value="30" calcext:value-type="float">
            <text:p>30</text:p>
          </table:table-cell>
          <table:table-cell table:style-name="ce11" office:value-type="string" calcext:value-type="string">
            <text:p>徳川綱吉</text:p>
          </table:table-cell>
          <table:table-cell table:style-name="ce11" table:formula="of:=[.E163]" office:value-type="string" office:string-value="徳川綱吉" calcext:value-type="string">
            <text:p>徳川綱吉</text:p>
          </table:table-cell>
          <table:table-cell table:style-name="ce11" office:value-type="string" calcext:value-type="string">
            <text:p>とくがわつなよし</text:p>
          </table:table-cell>
          <table:table-cell table:style-name="ce11" office:value-type="string" calcext:value-type="string">
            <text:p>第２弾ブースターパック</text:p>
          </table:table-cell>
          <table:table-cell table:style-name="ce11" table:formula="of:=VLOOKUP([.H163];[$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3];[$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3];[$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63];[$特性番号.$A$1:$特性番号.$B$8];2;0);0)" office:value-type="float" office:value="0" calcext:value-type="float">
            <text:p>0</text:p>
          </table:table-cell>
          <table:table-cell table:style-name="ce11"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6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0.png</text:p>
          </table:table-cell>
          <table:table-cell table:style-name="ce11" table:formula="of:=CONCATENATE([$JSON.$A$1];[.$C163];[$JSON.$B$1];[.$E163];[$JSON.$C$1];[.F163];[$JSON.$D$1];[.$G163];[$JSON.$E$1];IF(ISNA([.$T163]);&quot;null&quot;;&quot;&quot;&quot;&quot;&amp;[.$T163]&amp;&quot;&quot;&quot;&quot;);[$JSON.$F$1];[.$V163];[$JSON.$G$1];IF(ISNA([.$X163]);&quot;null&quot;;&quot;&quot;&quot;&quot;&amp;[.$X163]&amp;&quot;&quot;&quot;&quot;);[$JSON.$H$1];[.$AA163];[$JSON.$I$1];[.$I163];[$JSON.$J$1];[.K163];[$JSON.$K$1];[.$M163];[$JSON.$L$1];[.$P163];[$JSON.$M$1];[.$O163];[$JSON.$N$1];[.$S163];[$JSON.$O$1];[.$U163];[$JSON.$P$1];IF(ISNA([.$W163]);&quot;null&quot;;[.$W163]);[$JSON.$Q$1];[.$Y163];[$JSON.$R$1];IF([.$Z163];&quot;true&quot;;&quot;false&quot;);[$JSON.$S$1];[.$A163];[$JSON.$T$1];[.$B163];[$JSON.$U$1])" office:value-type="string" office:string-value="{&quot;id&quot;:&quot;2-30&quot;,&quot;name&quot;:&quot;徳川綱吉&quot;,&quot;displayName&quot;:&quot;徳川綱吉&quot;,&quot;kana&quot;:&quot;とくがわつなよし&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rarity&quot;:1,&quot;type&quot;:1,&quot;level&quot;:5,&quot;color&quot;:4,&quot;term&quot;:0,&quot;trait&quot;:0,&quot;power&quot;:1000,&quot;legacy&quot;:4,&quot;anyNumCopies&quot;:false,&quot;orderTable&quot;:162,&quot;orderDeck&quot;:210}," calcext:value-type="string">
            <text:p>{"id":"2-30","name":"徳川綱吉","displayName":"徳川綱吉","kana":"とくがわつなよし","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rarity":1,"type":1,"level":5,"color":4,"term":0,"trait":0,"power":1000,"legacy":4,"anyNumCopies":false,"orderTable":162,"orderDeck":210},</text:p>
          </table:table-cell>
          <table:table-cell table:number-columns-repeated="16356"/>
        </table:table-row>
        <table:table-row table:style-name="ro2">
          <table:table-cell table:style-name="ce11" office:value-type="float" office:value="163" calcext:value-type="float">
            <text:p>163</text:p>
          </table:table-cell>
          <table:table-cell table:style-name="ce11" office:value-type="float" office:value="283" calcext:value-type="float">
            <text:p>283</text:p>
          </table:table-cell>
          <table:table-cell table:style-name="ce21" office:value-type="string" calcext:value-type="string">
            <text:p>2-31</text:p>
          </table:table-cell>
          <table:table-cell table:style-name="ce21" office:value-type="float" office:value="31" calcext:value-type="float">
            <text:p>31</text:p>
          </table:table-cell>
          <table:table-cell table:style-name="ce11" office:value-type="string" calcext:value-type="string">
            <text:p>東洲斎写楽</text:p>
          </table:table-cell>
          <table:table-cell table:style-name="ce11" table:formula="of:=[.E164]" office:value-type="string" office:string-value="東洲斎写楽" calcext:value-type="string">
            <text:p>東洲斎写楽</text:p>
          </table:table-cell>
          <table:table-cell table:style-name="ce11" office:value-type="string" calcext:value-type="string">
            <text:p>とうしゅうさいしゃらく</text:p>
          </table:table-cell>
          <table:table-cell table:style-name="ce11" office:value-type="string" calcext:value-type="string">
            <text:p>第２弾ブースターパック</text:p>
          </table:table-cell>
          <table:table-cell table:style-name="ce11" table:formula="of:=VLOOKUP([.H164];[$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6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4];[$種類番号.$A$1:$種類番号.$B$4];2;0)" office:value-type="float" office:value="1" calcext:value-type="float">
            <text:p>1</text:p>
          </table:table-cell>
          <table:table-cell table:style-name="ce11" office:value-type="string" calcext:value-type="string">
            <text:p>緑</text:p>
          </table:table-cell>
          <table:table-cell table:style-name="ce11" table:formula="of:=VLOOKUP([.N164];[$色番号.$A$1:$色番号.$B$10];2;0)" office:value-type="float" office:value="4" calcext:value-type="float">
            <text:p>4</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4];[$能力語番号.$A$1:$能力語番号.$B$11];2;0);0)" office:value-type="float" office:value="0" calcext:value-type="float">
            <text:p>0</text:p>
          </table:table-cell>
          <table:table-cell office:value-type="string" calcext:value-type="string">
            <text:p>美術</text:p>
          </table:table-cell>
          <table:table-cell table:style-name="ce11" table:formula="of:=IFERROR(VLOOKUP([.$T164];[$特性番号.$A$1:$特性番号.$B$8];2;0);0)" office:value-type="float" office:value="2" calcext:value-type="float">
            <text:p>2</text:p>
          </table:table-cell>
          <table:table-cell table:style-name="ce11" office:value-type="string" calcext:value-type="string">
            <text:p>破壊されたとき、自分の手札か自分の墓地のレベル7以下の「美術」カード1つを指定して発動できる。そのカードを戦場に置く。</text:p>
          </table:table-cell>
          <table:table-cell table:style-name="ce11" office:value-type="float" office:value="7000" calcext:value-type="float">
            <text:p>7000</text:p>
          </table:table-cell>
          <table:table-cell table:style-name="ce25" office:value-type="string" calcext:value-type="string">
            <text:p>1ドローする</text:p>
          </table:table-cell>
          <table:table-cell table:style-name="ce11" table:formula="of:=IFERROR(VLOOKUP([.$X16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1.png</text:p>
          </table:table-cell>
          <table:table-cell table:style-name="ce11" table:formula="of:=CONCATENATE([$JSON.$A$1];[.$C164];[$JSON.$B$1];[.$E164];[$JSON.$C$1];[.F164];[$JSON.$D$1];[.$G164];[$JSON.$E$1];IF(ISNA([.$T164]);&quot;null&quot;;&quot;&quot;&quot;&quot;&amp;[.$T164]&amp;&quot;&quot;&quot;&quot;);[$JSON.$F$1];[.$V164];[$JSON.$G$1];IF(ISNA([.$X164]);&quot;null&quot;;&quot;&quot;&quot;&quot;&amp;[.$X164]&amp;&quot;&quot;&quot;&quot;);[$JSON.$H$1];[.$AA164];[$JSON.$I$1];[.$I164];[$JSON.$J$1];[.K164];[$JSON.$K$1];[.$M164];[$JSON.$L$1];[.$P164];[$JSON.$M$1];[.$O164];[$JSON.$N$1];[.$S164];[$JSON.$O$1];[.$U164];[$JSON.$P$1];IF(ISNA([.$W164]);&quot;null&quot;;[.$W164]);[$JSON.$Q$1];[.$Y164];[$JSON.$R$1];IF([.$Z164];&quot;true&quot;;&quot;false&quot;);[$JSON.$S$1];[.$A164];[$JSON.$T$1];[.$B164];[$JSON.$U$1])" office:value-type="string" office:string-value="{&quot;id&quot;:&quot;2-31&quot;,&quot;name&quot;:&quot;東洲斎写楽&quot;,&quot;displayName&quot;:&quot;東洲斎写楽&quot;,&quot;kana&quot;:&quot;とうしゅうさいしゃらく&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rarity&quot;:1,&quot;type&quot;:1,&quot;level&quot;:8,&quot;color&quot;:4,&quot;term&quot;:0,&quot;trait&quot;:2,&quot;power&quot;:7000,&quot;legacy&quot;:4,&quot;anyNumCopies&quot;:false,&quot;orderTable&quot;:163,&quot;orderDeck&quot;:283}," calcext:value-type="string">
            <text:p>{"id":"2-31","name":"東洲斎写楽","displayName":"東洲斎写楽","kana":"とうしゅうさいしゃらく","traitText":"美術","ruleText":"破壊されたとき、自分の手札か自分の墓地のレベル7以下の「美術」カード1つを指定して発動できる。そのカードを戦場に置く。","legacyText":"1ドローする","imageUrl":"https://one-draw.jp/ijinden/cardlist/002/card/02_031.png","expansion":25,"rarity":1,"type":1,"level":8,"color":4,"term":0,"trait":2,"power":7000,"legacy":4,"anyNumCopies":false,"orderTable":163,"orderDeck":283},</text:p>
          </table:table-cell>
          <table:table-cell table:number-columns-repeated="16356"/>
        </table:table-row>
        <table:table-row table:style-name="ro2">
          <table:table-cell table:style-name="ce11" office:value-type="float" office:value="164" calcext:value-type="float">
            <text:p>164</text:p>
          </table:table-cell>
          <table:table-cell table:style-name="ce11" office:value-type="float" office:value="168" calcext:value-type="float">
            <text:p>168</text:p>
          </table:table-cell>
          <table:table-cell table:style-name="ce21" office:value-type="string" calcext:value-type="string">
            <text:p>2-32</text:p>
          </table:table-cell>
          <table:table-cell table:style-name="ce21" office:value-type="float" office:value="32" calcext:value-type="float">
            <text:p>32</text:p>
          </table:table-cell>
          <table:table-cell table:style-name="ce11" office:value-type="string" calcext:value-type="string">
            <text:p>曹操</text:p>
          </table:table-cell>
          <table:table-cell table:style-name="ce11" table:formula="of:=[.E165]" office:value-type="string" office:string-value="曹操" calcext:value-type="string">
            <text:p>曹操</text:p>
          </table:table-cell>
          <table:table-cell table:style-name="ce11" office:value-type="string" calcext:value-type="string">
            <text:p>そうそう</text:p>
          </table:table-cell>
          <table:table-cell table:style-name="ce11" office:value-type="string" calcext:value-type="string">
            <text:p>第２弾ブースターパック</text:p>
          </table:table-cell>
          <table:table-cell table:style-name="ce11" table:formula="of:=VLOOKUP([.H165];[$収録番号.$A$1:$収録番号.$B$10];2;0)" office:value-type="float" office:value="25" calcext:value-type="float">
            <text:p>25</text:p>
          </table:table-cell>
          <table:table-cell table:style-name="ce11" office:value-type="string" calcext:value-type="string">
            <text:p>R</text:p>
          </table:table-cell>
          <table:table-cell table:style-name="ce11" table:formula="of:=VLOOKUP([.J16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6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5];[$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165];[$能力語番号.$A$1:$能力語番号.$B$11];2;0);0)" office:value-type="float" office:value="8" calcext:value-type="float">
            <text:p>8</text:p>
          </table:table-cell>
          <table:table-cell table:formula="of:=NA()" office:value-type="string" office:string-value="" calcext:value-type="error">
            <text:p>#N/A</text:p>
          </table:table-cell>
          <table:table-cell table:style-name="ce11" table:formula="of:=IFERROR(VLOOKUP([.$T165];[$特性番号.$A$1:$特性番号.$B$8];2;0);0)" office:value-type="float" office:value="0" calcext:value-type="float">
            <text:p>0</text:p>
          </table:table-cell>
          <table:table-cell table:style-name="ce11"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16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2.png</text:p>
          </table:table-cell>
          <table:table-cell table:style-name="ce11" table:formula="of:=CONCATENATE([$JSON.$A$1];[.$C165];[$JSON.$B$1];[.$E165];[$JSON.$C$1];[.F165];[$JSON.$D$1];[.$G165];[$JSON.$E$1];IF(ISNA([.$T165]);&quot;null&quot;;&quot;&quot;&quot;&quot;&amp;[.$T165]&amp;&quot;&quot;&quot;&quot;);[$JSON.$F$1];[.$V165];[$JSON.$G$1];IF(ISNA([.$X165]);&quot;null&quot;;&quot;&quot;&quot;&quot;&amp;[.$X165]&amp;&quot;&quot;&quot;&quot;);[$JSON.$H$1];[.$AA165];[$JSON.$I$1];[.$I165];[$JSON.$J$1];[.K165];[$JSON.$K$1];[.$M165];[$JSON.$L$1];[.$P165];[$JSON.$M$1];[.$O165];[$JSON.$N$1];[.$S165];[$JSON.$O$1];[.$U165];[$JSON.$P$1];IF(ISNA([.$W165]);&quot;null&quot;;[.$W165]);[$JSON.$Q$1];[.$Y165];[$JSON.$R$1];IF([.$Z165];&quot;true&quot;;&quot;false&quot;);[$JSON.$S$1];[.$A165];[$JSON.$T$1];[.$B165];[$JSON.$U$1])" office:value-type="string" office:string-value="{&quot;id&quot;:&quot;2-32&quot;,&quot;name&quot;:&quot;曹操&quot;,&quot;displayName&quot;:&quot;曹操&quot;,&quot;kana&quot;:&quot;そうそう&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rarity&quot;:2,&quot;type&quot;:1,&quot;level&quot;:4,&quot;color&quot;:8,&quot;term&quot;:8,&quot;trait&quot;:0,&quot;power&quot;:3000,&quot;legacy&quot;:0,&quot;anyNumCopies&quot;:false,&quot;orderTable&quot;:164,&quot;orderDeck&quot;:168}," calcext:value-type="string">
            <text:p>{"id":"2-32","name":"曹操","displayName":"曹操","kana":"そうそう","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rarity":2,"type":1,"level":4,"color":8,"term":8,"trait":0,"power":3000,"legacy":0,"anyNumCopies":false,"orderTable":164,"orderDeck":168},</text:p>
          </table:table-cell>
          <table:table-cell table:number-columns-repeated="16356"/>
        </table:table-row>
        <table:table-row table:style-name="ro2">
          <table:table-cell table:style-name="ce11" office:value-type="float" office:value="165" calcext:value-type="float">
            <text:p>165</text:p>
          </table:table-cell>
          <table:table-cell table:style-name="ce11" office:value-type="float" office:value="68" calcext:value-type="float">
            <text:p>68</text:p>
          </table:table-cell>
          <table:table-cell table:style-name="ce21" office:value-type="string" calcext:value-type="string">
            <text:p>2-33</text:p>
          </table:table-cell>
          <table:table-cell table:style-name="ce21" office:value-type="float" office:value="33" calcext:value-type="float">
            <text:p>33</text:p>
          </table:table-cell>
          <table:table-cell table:style-name="ce11" office:value-type="string" calcext:value-type="string">
            <text:p>張角</text:p>
          </table:table-cell>
          <table:table-cell table:style-name="ce11" table:formula="of:=[.E166]" office:value-type="string" office:string-value="張角" calcext:value-type="string">
            <text:p>張角</text:p>
          </table:table-cell>
          <table:table-cell table:style-name="ce11" office:value-type="string" calcext:value-type="string">
            <text:p>ちょうかく</text:p>
          </table:table-cell>
          <table:table-cell table:style-name="ce11" office:value-type="string" calcext:value-type="string">
            <text:p>第２弾ブースターパック</text:p>
          </table:table-cell>
          <table:table-cell table:style-name="ce11" table:formula="of:=VLOOKUP([.H166];[$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6];[$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66];[$特性番号.$A$1:$特性番号.$B$8];2;0);0)" office:value-type="float" office:value="0" calcext:value-type="float">
            <text:p>0</text:p>
          </table:table-cell>
          <table:table-cell table:style-name="ce11"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table:style-name="ce11" office:value-type="float" office:value="1000" calcext:value-type="float">
            <text:p>1000</text:p>
          </table:table-cell>
          <table:table-cell table:style-name="ce25" office:value-type="string" calcext:value-type="string">
            <text:p>反魂</text:p>
          </table:table-cell>
          <table:table-cell table:style-name="ce11" table:formula="of:=IFERROR(VLOOKUP([.$X166];[$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3.png</text:p>
          </table:table-cell>
          <table:table-cell table:style-name="ce11" table:formula="of:=CONCATENATE([$JSON.$A$1];[.$C166];[$JSON.$B$1];[.$E166];[$JSON.$C$1];[.F166];[$JSON.$D$1];[.$G166];[$JSON.$E$1];IF(ISNA([.$T166]);&quot;null&quot;;&quot;&quot;&quot;&quot;&amp;[.$T166]&amp;&quot;&quot;&quot;&quot;);[$JSON.$F$1];[.$V166];[$JSON.$G$1];IF(ISNA([.$X166]);&quot;null&quot;;&quot;&quot;&quot;&quot;&amp;[.$X166]&amp;&quot;&quot;&quot;&quot;);[$JSON.$H$1];[.$AA166];[$JSON.$I$1];[.$I166];[$JSON.$J$1];[.K166];[$JSON.$K$1];[.$M166];[$JSON.$L$1];[.$P166];[$JSON.$M$1];[.$O166];[$JSON.$N$1];[.$S166];[$JSON.$O$1];[.$U166];[$JSON.$P$1];IF(ISNA([.$W166]);&quot;null&quot;;[.$W166]);[$JSON.$Q$1];[.$Y166];[$JSON.$R$1];IF([.$Z166];&quot;true&quot;;&quot;false&quot;);[$JSON.$S$1];[.$A166];[$JSON.$T$1];[.$B166];[$JSON.$U$1])" office:value-type="string" office:string-value="{&quot;id&quot;:&quot;2-33&quot;,&quot;name&quot;:&quot;張角&quot;,&quot;displayName&quot;:&quot;張角&quot;,&quot;kana&quot;:&quot;ちょうかく&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rarity&quot;:1,&quot;type&quot;:1,&quot;level&quot;:2,&quot;color&quot;:8,&quot;term&quot;:0,&quot;trait&quot;:0,&quot;power&quot;:1000,&quot;legacy&quot;:6,&quot;anyNumCopies&quot;:false,&quot;orderTable&quot;:165,&quot;orderDeck&quot;:68}," calcext:value-type="string">
            <text:p>{"id":"2-33","name":"張角","displayName":"張角","kana":"ちょうかく","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rarity":1,"type":1,"level":2,"color":8,"term":0,"trait":0,"power":1000,"legacy":6,"anyNumCopies":false,"orderTable":165,"orderDeck":68},</text:p>
          </table:table-cell>
          <table:table-cell table:number-columns-repeated="16356"/>
        </table:table-row>
        <table:table-row table:style-name="ro2">
          <table:table-cell table:style-name="ce11" office:value-type="float" office:value="166" calcext:value-type="float">
            <text:p>166</text:p>
          </table:table-cell>
          <table:table-cell table:style-name="ce11" office:value-type="float" office:value="119" calcext:value-type="float">
            <text:p>119</text:p>
          </table:table-cell>
          <table:table-cell table:style-name="ce21" office:value-type="string" calcext:value-type="string">
            <text:p>2-34</text:p>
          </table:table-cell>
          <table:table-cell table:style-name="ce21" office:value-type="float" office:value="34" calcext:value-type="float">
            <text:p>34</text:p>
          </table:table-cell>
          <table:table-cell table:style-name="ce11" office:value-type="string" calcext:value-type="string">
            <text:p>劉備</text:p>
          </table:table-cell>
          <table:table-cell table:style-name="ce11" table:formula="of:=[.E167]" office:value-type="string" office:string-value="劉備" calcext:value-type="string">
            <text:p>劉備</text:p>
          </table:table-cell>
          <table:table-cell table:style-name="ce11" office:value-type="string" calcext:value-type="string">
            <text:p>りゅうび</text:p>
          </table:table-cell>
          <table:table-cell table:style-name="ce11" office:value-type="string" calcext:value-type="string">
            <text:p>第２弾ブースターパック</text:p>
          </table:table-cell>
          <table:table-cell table:style-name="ce11" table:formula="of:=VLOOKUP([.H167];[$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67];[$特性番号.$A$1:$特性番号.$B$8];2;0);0)" office:value-type="float" office:value="0" calcext:value-type="float">
            <text:p>0</text:p>
          </table:table-cell>
          <table:table-cell table:style-name="ce11"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6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4.png</text:p>
          </table:table-cell>
          <table:table-cell table:style-name="ce11" table:formula="of:=CONCATENATE([$JSON.$A$1];[.$C167];[$JSON.$B$1];[.$E167];[$JSON.$C$1];[.F167];[$JSON.$D$1];[.$G167];[$JSON.$E$1];IF(ISNA([.$T167]);&quot;null&quot;;&quot;&quot;&quot;&quot;&amp;[.$T167]&amp;&quot;&quot;&quot;&quot;);[$JSON.$F$1];[.$V167];[$JSON.$G$1];IF(ISNA([.$X167]);&quot;null&quot;;&quot;&quot;&quot;&quot;&amp;[.$X167]&amp;&quot;&quot;&quot;&quot;);[$JSON.$H$1];[.$AA167];[$JSON.$I$1];[.$I167];[$JSON.$J$1];[.K167];[$JSON.$K$1];[.$M167];[$JSON.$L$1];[.$P167];[$JSON.$M$1];[.$O167];[$JSON.$N$1];[.$S167];[$JSON.$O$1];[.$U167];[$JSON.$P$1];IF(ISNA([.$W167]);&quot;null&quot;;[.$W167]);[$JSON.$Q$1];[.$Y167];[$JSON.$R$1];IF([.$Z167];&quot;true&quot;;&quot;false&quot;);[$JSON.$S$1];[.$A167];[$JSON.$T$1];[.$B167];[$JSON.$U$1])" office:value-type="string" office:string-value="{&quot;id&quot;:&quot;2-34&quot;,&quot;name&quot;:&quot;劉備&quot;,&quot;displayName&quot;:&quot;劉備&quot;,&quot;kana&quot;:&quot;りゅうび&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rarity&quot;:1,&quot;type&quot;:1,&quot;level&quot;:3,&quot;color&quot;:8,&quot;term&quot;:0,&quot;trait&quot;:0,&quot;power&quot;:2000,&quot;legacy&quot;:4,&quot;anyNumCopies&quot;:false,&quot;orderTable&quot;:166,&quot;orderDeck&quot;:119}," calcext:value-type="string">
            <text:p>{"id":"2-34","name":"劉備","displayName":"劉備","kana":"りゅうび","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rarity":1,"type":1,"level":3,"color":8,"term":0,"trait":0,"power":2000,"legacy":4,"anyNumCopies":false,"orderTable":166,"orderDeck":119},</text:p>
          </table:table-cell>
          <table:table-cell table:number-columns-repeated="16356"/>
        </table:table-row>
        <table:table-row table:style-name="ro2">
          <table:table-cell table:style-name="ce11" office:value-type="float" office:value="167" calcext:value-type="float">
            <text:p>167</text:p>
          </table:table-cell>
          <table:table-cell table:style-name="ce11" office:value-type="float" office:value="215" calcext:value-type="float">
            <text:p>215</text:p>
          </table:table-cell>
          <table:table-cell table:style-name="ce21" office:value-type="string" calcext:value-type="string">
            <text:p>2-35</text:p>
          </table:table-cell>
          <table:table-cell table:style-name="ce21" office:value-type="float" office:value="35" calcext:value-type="float">
            <text:p>35</text:p>
          </table:table-cell>
          <table:table-cell table:style-name="ce11" office:value-type="string" calcext:value-type="string">
            <text:p>司馬懿</text:p>
          </table:table-cell>
          <table:table-cell table:style-name="ce11" table:formula="of:=[.E168]" office:value-type="string" office:string-value="司馬懿" calcext:value-type="string">
            <text:p>司馬懿</text:p>
          </table:table-cell>
          <table:table-cell table:style-name="ce11" office:value-type="string" calcext:value-type="string">
            <text:p>しばい</text:p>
          </table:table-cell>
          <table:table-cell table:style-name="ce11" office:value-type="string" calcext:value-type="string">
            <text:p>第２弾ブースターパック</text:p>
          </table:table-cell>
          <table:table-cell table:style-name="ce11" table:formula="of:=VLOOKUP([.H168];[$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8];[$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68];[$特性番号.$A$1:$特性番号.$B$8];2;0);0)" office:value-type="float" office:value="0" calcext:value-type="float">
            <text:p>0</text:p>
          </table:table-cell>
          <table:table-cell table:style-name="ce11" office:value-type="string" calcext:value-type="string">
            <text:p>自分の墓地にある「徴募」が発動したとき、自分の山札の上から1枚をガーディアンにして戦場に置く。¶ブロック+2000</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16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5.png</text:p>
          </table:table-cell>
          <table:table-cell table:style-name="ce11" table:formula="of:=CONCATENATE([$JSON.$A$1];[.$C168];[$JSON.$B$1];[.$E168];[$JSON.$C$1];[.F168];[$JSON.$D$1];[.$G168];[$JSON.$E$1];IF(ISNA([.$T168]);&quot;null&quot;;&quot;&quot;&quot;&quot;&amp;[.$T168]&amp;&quot;&quot;&quot;&quot;);[$JSON.$F$1];[.$V168];[$JSON.$G$1];IF(ISNA([.$X168]);&quot;null&quot;;&quot;&quot;&quot;&quot;&amp;[.$X168]&amp;&quot;&quot;&quot;&quot;);[$JSON.$H$1];[.$AA168];[$JSON.$I$1];[.$I168];[$JSON.$J$1];[.K168];[$JSON.$K$1];[.$M168];[$JSON.$L$1];[.$P168];[$JSON.$M$1];[.$O168];[$JSON.$N$1];[.$S168];[$JSON.$O$1];[.$U168];[$JSON.$P$1];IF(ISNA([.$W168]);&quot;null&quot;;[.$W168]);[$JSON.$Q$1];[.$Y168];[$JSON.$R$1];IF([.$Z168];&quot;true&quot;;&quot;false&quot;);[$JSON.$S$1];[.$A168];[$JSON.$T$1];[.$B168];[$JSON.$U$1])" office:value-type="string" office:string-value="{&quot;id&quot;:&quot;2-35&quot;,&quot;name&quot;:&quot;司馬懿&quot;,&quot;displayName&quot;:&quot;司馬懿&quot;,&quot;kana&quot;:&quot;しばい&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rarity&quot;:1,&quot;type&quot;:1,&quot;level&quot;:5,&quot;color&quot;:8,&quot;term&quot;:0,&quot;trait&quot;:0,&quot;power&quot;:4000,&quot;legacy&quot;:4,&quot;anyNumCopies&quot;:false,&quot;orderTable&quot;:167,&quot;orderDeck&quot;:215}," calcext:value-type="string">
            <text:p>{"id":"2-35","name":"司馬懿","displayName":"司馬懿","kana":"しばい","traitText":null,"ruleText":"自分の墓地にある「徴募」が発動したとき、自分の山札の上から1枚をガーディアンにして戦場に置く。¶ブロック+2000","legacyText":"1ドローする","imageUrl":"https://one-draw.jp/ijinden/cardlist/002/card/02_035.png","expansion":25,"rarity":1,"type":1,"level":5,"color":8,"term":0,"trait":0,"power":4000,"legacy":4,"anyNumCopies":false,"orderTable":167,"orderDeck":215},</text:p>
          </table:table-cell>
          <table:table-cell table:number-columns-repeated="16356"/>
        </table:table-row>
        <table:table-row table:style-name="ro2">
          <table:table-cell table:style-name="ce11" office:value-type="float" office:value="168" calcext:value-type="float">
            <text:p>168</text:p>
          </table:table-cell>
          <table:table-cell table:style-name="ce11" office:value-type="float" office:value="273" calcext:value-type="float">
            <text:p>273</text:p>
          </table:table-cell>
          <table:table-cell table:style-name="ce21" office:value-type="string" calcext:value-type="string">
            <text:p>2-36</text:p>
          </table:table-cell>
          <table:table-cell table:style-name="ce21" office:value-type="float" office:value="36" calcext:value-type="float">
            <text:p>36</text:p>
          </table:table-cell>
          <table:table-cell table:style-name="ce11" office:value-type="string" calcext:value-type="string">
            <text:p>足利義政</text:p>
          </table:table-cell>
          <table:table-cell table:style-name="ce11" table:formula="of:=[.E169]" office:value-type="string" office:string-value="足利義政" calcext:value-type="string">
            <text:p>足利義政</text:p>
          </table:table-cell>
          <table:table-cell table:style-name="ce11" office:value-type="string" calcext:value-type="string">
            <text:p>あしかがよしまさ</text:p>
          </table:table-cell>
          <table:table-cell table:style-name="ce11" office:value-type="string" calcext:value-type="string">
            <text:p>第２弾ブースターパック</text:p>
          </table:table-cell>
          <table:table-cell table:style-name="ce11" table:formula="of:=VLOOKUP([.H169];[$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6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6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69];[$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6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69];[$特性番号.$A$1:$特性番号.$B$8];2;0);0)" office:value-type="float" office:value="0" calcext:value-type="float">
            <text:p>0</text:p>
          </table:table-cell>
          <table:table-cell table:style-name="ce11" office:value-type="string" calcext:value-type="string">
            <text:p>赤のイジンが自分の戦場に置かれたときに発動できる。2ドローするか、イジン召喚権+2する。</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16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6.png</text:p>
          </table:table-cell>
          <table:table-cell table:style-name="ce11" table:formula="of:=CONCATENATE([$JSON.$A$1];[.$C169];[$JSON.$B$1];[.$E169];[$JSON.$C$1];[.F169];[$JSON.$D$1];[.$G169];[$JSON.$E$1];IF(ISNA([.$T169]);&quot;null&quot;;&quot;&quot;&quot;&quot;&amp;[.$T169]&amp;&quot;&quot;&quot;&quot;);[$JSON.$F$1];[.$V169];[$JSON.$G$1];IF(ISNA([.$X169]);&quot;null&quot;;&quot;&quot;&quot;&quot;&amp;[.$X169]&amp;&quot;&quot;&quot;&quot;);[$JSON.$H$1];[.$AA169];[$JSON.$I$1];[.$I169];[$JSON.$J$1];[.K169];[$JSON.$K$1];[.$M169];[$JSON.$L$1];[.$P169];[$JSON.$M$1];[.$O169];[$JSON.$N$1];[.$S169];[$JSON.$O$1];[.$U169];[$JSON.$P$1];IF(ISNA([.$W169]);&quot;null&quot;;[.$W169]);[$JSON.$Q$1];[.$Y169];[$JSON.$R$1];IF([.$Z169];&quot;true&quot;;&quot;false&quot;);[$JSON.$S$1];[.$A169];[$JSON.$T$1];[.$B169];[$JSON.$U$1])" office:value-type="string" office:string-value="{&quot;id&quot;:&quot;2-36&quot;,&quot;name&quot;:&quot;足利義政&quot;,&quot;displayName&quot;:&quot;足利義政&quot;,&quot;kana&quot;:&quot;あしかがよしまさ&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rarity&quot;:1,&quot;type&quot;:1,&quot;level&quot;:7,&quot;color&quot;:8,&quot;term&quot;:0,&quot;trait&quot;:0,&quot;power&quot;:6000,&quot;legacy&quot;:1,&quot;anyNumCopies&quot;:false,&quot;orderTable&quot;:168,&quot;orderDeck&quot;:273}," calcext:value-type="string">
            <text:p>{"id":"2-36","name":"足利義政","displayName":"足利義政","kana":"あしかがよしまさ","traitText":null,"ruleText":"赤のイジンが自分の戦場に置かれたときに発動できる。2ドローするか、イジン召喚権+2する。","legacyText":"魔力化","imageUrl":"https://one-draw.jp/ijinden/cardlist/002/card/02_036.png","expansion":25,"rarity":1,"type":1,"level":7,"color":8,"term":0,"trait":0,"power":6000,"legacy":1,"anyNumCopies":false,"orderTable":168,"orderDeck":273},</text:p>
          </table:table-cell>
          <table:table-cell table:number-columns-repeated="16356"/>
        </table:table-row>
        <table:table-row table:style-name="ro2">
          <table:table-cell table:style-name="ce11" office:value-type="float" office:value="169" calcext:value-type="float">
            <text:p>169</text:p>
          </table:table-cell>
          <table:table-cell table:style-name="ce11" office:value-type="float" office:value="294" calcext:value-type="float">
            <text:p>294</text:p>
          </table:table-cell>
          <table:table-cell table:style-name="ce21" office:value-type="string" calcext:value-type="string">
            <text:p>2-37</text:p>
          </table:table-cell>
          <table:table-cell table:style-name="ce21" office:value-type="float" office:value="37" calcext:value-type="float">
            <text:p>37</text:p>
          </table:table-cell>
          <table:table-cell table:style-name="ce11" office:value-type="string" calcext:value-type="string">
            <text:p>姜維</text:p>
          </table:table-cell>
          <table:table-cell table:style-name="ce11" table:formula="of:=[.E170]" office:value-type="string" office:string-value="姜維" calcext:value-type="string">
            <text:p>姜維</text:p>
          </table:table-cell>
          <table:table-cell table:style-name="ce11" office:value-type="string" calcext:value-type="string">
            <text:p>きょうい</text:p>
          </table:table-cell>
          <table:table-cell table:style-name="ce11" office:value-type="string" calcext:value-type="string">
            <text:p>第２弾ブースターパック</text:p>
          </table:table-cell>
          <table:table-cell table:style-name="ce11" table:formula="of:=VLOOKUP([.H170];[$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7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0];[$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0];[$色番号.$A$1:$色番号.$B$10];2;0)" office:value-type="float" office:value="8" calcext:value-type="float">
            <text:p>8</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70];[$特性番号.$A$1:$特性番号.$B$8];2;0);0)" office:value-type="float" office:value="0" calcext:value-type="float">
            <text:p>0</text:p>
          </table:table-cell>
          <table:table-cell table:style-name="ce11"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17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7.png</text:p>
          </table:table-cell>
          <table:table-cell table:style-name="ce11" table:formula="of:=CONCATENATE([$JSON.$A$1];[.$C170];[$JSON.$B$1];[.$E170];[$JSON.$C$1];[.F170];[$JSON.$D$1];[.$G170];[$JSON.$E$1];IF(ISNA([.$T170]);&quot;null&quot;;&quot;&quot;&quot;&quot;&amp;[.$T170]&amp;&quot;&quot;&quot;&quot;);[$JSON.$F$1];[.$V170];[$JSON.$G$1];IF(ISNA([.$X170]);&quot;null&quot;;&quot;&quot;&quot;&quot;&amp;[.$X170]&amp;&quot;&quot;&quot;&quot;);[$JSON.$H$1];[.$AA170];[$JSON.$I$1];[.$I170];[$JSON.$J$1];[.K170];[$JSON.$K$1];[.$M170];[$JSON.$L$1];[.$P170];[$JSON.$M$1];[.$O170];[$JSON.$N$1];[.$S170];[$JSON.$O$1];[.$U170];[$JSON.$P$1];IF(ISNA([.$W170]);&quot;null&quot;;[.$W170]);[$JSON.$Q$1];[.$Y170];[$JSON.$R$1];IF([.$Z170];&quot;true&quot;;&quot;false&quot;);[$JSON.$S$1];[.$A170];[$JSON.$T$1];[.$B170];[$JSON.$U$1])" office:value-type="string" office:string-value="{&quot;id&quot;:&quot;2-37&quot;,&quot;name&quot;:&quot;姜維&quot;,&quot;displayName&quot;:&quot;姜維&quot;,&quot;kana&quot;:&quot;きょうい&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rarity&quot;:1,&quot;type&quot;:1,&quot;level&quot;:9,&quot;color&quot;:8,&quot;term&quot;:0,&quot;trait&quot;:0,&quot;power&quot;:7000,&quot;legacy&quot;:0,&quot;anyNumCopies&quot;:false,&quot;orderTable&quot;:169,&quot;orderDeck&quot;:294}," calcext:value-type="string">
            <text:p>{"id":"2-37","name":"姜維","displayName":"姜維","kana":"きょうい","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rarity":1,"type":1,"level":9,"color":8,"term":0,"trait":0,"power":7000,"legacy":0,"anyNumCopies":false,"orderTable":169,"orderDeck":294},</text:p>
          </table:table-cell>
          <table:table-cell table:number-columns-repeated="16356"/>
        </table:table-row>
        <table:table-row table:style-name="ro2">
          <table:table-cell table:style-name="ce11" office:value-type="float" office:value="170" calcext:value-type="float">
            <text:p>170</text:p>
          </table:table-cell>
          <table:table-cell table:style-name="ce11" office:value-type="float" office:value="286" calcext:value-type="float">
            <text:p>286</text:p>
          </table:table-cell>
          <table:table-cell table:style-name="ce21" office:value-type="string" calcext:value-type="string">
            <text:p>2-38</text:p>
          </table:table-cell>
          <table:table-cell table:style-name="ce21" office:value-type="float" office:value="38" calcext:value-type="float">
            <text:p>38</text:p>
          </table:table-cell>
          <table:table-cell table:style-name="ce11" office:value-type="string" calcext:value-type="string">
            <text:p>裴松之</text:p>
          </table:table-cell>
          <table:table-cell table:style-name="ce11" table:formula="of:=[.E171]" office:value-type="string" office:string-value="裴松之" calcext:value-type="string">
            <text:p>裴松之</text:p>
          </table:table-cell>
          <table:table-cell table:style-name="ce11" office:value-type="string" calcext:value-type="string">
            <text:p>はいしょうし</text:p>
          </table:table-cell>
          <table:table-cell table:style-name="ce11" office:value-type="string" calcext:value-type="string">
            <text:p>第２弾ブースターパック</text:p>
          </table:table-cell>
          <table:table-cell table:style-name="ce11" table:formula="of:=VLOOKUP([.H171];[$収録番号.$A$1:$収録番号.$B$10];2;0)" office:value-type="float" office:value="25" calcext:value-type="float">
            <text:p>25</text:p>
          </table:table-cell>
          <table:table-cell table:style-name="ce11" office:value-type="string" calcext:value-type="string">
            <text:p>R</text:p>
          </table:table-cell>
          <table:table-cell table:style-name="ce11" table:formula="of:=VLOOKUP([.J17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1];[$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71];[$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171];[$特性番号.$A$1:$特性番号.$B$8];2;0);0)" office:value-type="float" office:value="0" calcext:value-type="float">
            <text:p>0</text:p>
          </table:table-cell>
          <table:table-cell table:style-name="ce11"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17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8.png</text:p>
          </table:table-cell>
          <table:table-cell table:style-name="ce11" table:formula="of:=CONCATENATE([$JSON.$A$1];[.$C171];[$JSON.$B$1];[.$E171];[$JSON.$C$1];[.F171];[$JSON.$D$1];[.$G171];[$JSON.$E$1];IF(ISNA([.$T171]);&quot;null&quot;;&quot;&quot;&quot;&quot;&amp;[.$T171]&amp;&quot;&quot;&quot;&quot;);[$JSON.$F$1];[.$V171];[$JSON.$G$1];IF(ISNA([.$X171]);&quot;null&quot;;&quot;&quot;&quot;&quot;&amp;[.$X171]&amp;&quot;&quot;&quot;&quot;);[$JSON.$H$1];[.$AA171];[$JSON.$I$1];[.$I171];[$JSON.$J$1];[.K171];[$JSON.$K$1];[.$M171];[$JSON.$L$1];[.$P171];[$JSON.$M$1];[.$O171];[$JSON.$N$1];[.$S171];[$JSON.$O$1];[.$U171];[$JSON.$P$1];IF(ISNA([.$W171]);&quot;null&quot;;[.$W171]);[$JSON.$Q$1];[.$Y171];[$JSON.$R$1];IF([.$Z171];&quot;true&quot;;&quot;false&quot;);[$JSON.$S$1];[.$A171];[$JSON.$T$1];[.$B171];[$JSON.$U$1])" office:value-type="string" office:string-value="{&quot;id&quot;:&quot;2-38&quot;,&quot;name&quot;:&quot;裴松之&quot;,&quot;displayName&quot;:&quot;裴松之&quot;,&quot;kana&quot;:&quot;はいしょうし&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rarity&quot;:2,&quot;type&quot;:1,&quot;level&quot;:8,&quot;color&quot;:8,&quot;term&quot;:2,&quot;trait&quot;:0,&quot;power&quot;:6000,&quot;legacy&quot;:1,&quot;anyNumCopies&quot;:false,&quot;orderTable&quot;:170,&quot;orderDeck&quot;:286}," calcext:value-type="string">
            <text:p>{"id":"2-38","name":"裴松之","displayName":"裴松之","kana":"はいしょうし","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rarity":2,"type":1,"level":8,"color":8,"term":2,"trait":0,"power":6000,"legacy":1,"anyNumCopies":false,"orderTable":170,"orderDeck":286},</text:p>
          </table:table-cell>
          <table:table-cell table:number-columns-repeated="16356"/>
        </table:table-row>
        <table:table-row table:style-name="ro2">
          <table:table-cell table:style-name="ce11" office:value-type="float" office:value="171" calcext:value-type="float">
            <text:p>171</text:p>
          </table:table-cell>
          <table:table-cell table:style-name="ce11" office:value-type="float" office:value="20" calcext:value-type="float">
            <text:p>20</text:p>
          </table:table-cell>
          <table:table-cell table:style-name="ce21" office:value-type="string" calcext:value-type="string">
            <text:p>2-39</text:p>
          </table:table-cell>
          <table:table-cell table:style-name="ce21" office:value-type="float" office:value="39" calcext:value-type="float">
            <text:p>39</text:p>
          </table:table-cell>
          <table:table-cell table:style-name="ce11" office:value-type="string" calcext:value-type="string">
            <text:p>陳寿</text:p>
          </table:table-cell>
          <table:table-cell table:style-name="ce11" table:formula="of:=[.E172]" office:value-type="string" office:string-value="陳寿" calcext:value-type="string">
            <text:p>陳寿</text:p>
          </table:table-cell>
          <table:table-cell table:style-name="ce11" office:value-type="string" calcext:value-type="string">
            <text:p>ちんじゅ</text:p>
          </table:table-cell>
          <table:table-cell table:style-name="ce11" office:value-type="string" calcext:value-type="string">
            <text:p>第２弾ブースターパック</text:p>
          </table:table-cell>
          <table:table-cell table:style-name="ce11" table:formula="of:=VLOOKUP([.H172];[$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2];[$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2];[$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172];[$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172];[$特性番号.$A$1:$特性番号.$B$8];2;0);0)" office:value-type="float" office:value="0" calcext:value-type="float">
            <text:p>0</text:p>
          </table:table-cell>
          <table:table-cell table:style-name="ce11"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17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39.png</text:p>
          </table:table-cell>
          <table:table-cell table:style-name="ce11" table:formula="of:=CONCATENATE([$JSON.$A$1];[.$C172];[$JSON.$B$1];[.$E172];[$JSON.$C$1];[.F172];[$JSON.$D$1];[.$G172];[$JSON.$E$1];IF(ISNA([.$T172]);&quot;null&quot;;&quot;&quot;&quot;&quot;&amp;[.$T172]&amp;&quot;&quot;&quot;&quot;);[$JSON.$F$1];[.$V172];[$JSON.$G$1];IF(ISNA([.$X172]);&quot;null&quot;;&quot;&quot;&quot;&quot;&amp;[.$X172]&amp;&quot;&quot;&quot;&quot;);[$JSON.$H$1];[.$AA172];[$JSON.$I$1];[.$I172];[$JSON.$J$1];[.K172];[$JSON.$K$1];[.$M172];[$JSON.$L$1];[.$P172];[$JSON.$M$1];[.$O172];[$JSON.$N$1];[.$S172];[$JSON.$O$1];[.$U172];[$JSON.$P$1];IF(ISNA([.$W172]);&quot;null&quot;;[.$W172]);[$JSON.$Q$1];[.$Y172];[$JSON.$R$1];IF([.$Z172];&quot;true&quot;;&quot;false&quot;);[$JSON.$S$1];[.$A172];[$JSON.$T$1];[.$B172];[$JSON.$U$1])" office:value-type="string" office:string-value="{&quot;id&quot;:&quot;2-39&quot;,&quot;name&quot;:&quot;陳寿&quot;,&quot;displayName&quot;:&quot;陳寿&quot;,&quot;kana&quot;:&quot;ちんじゅ&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rarity&quot;:1,&quot;type&quot;:1,&quot;level&quot;:1,&quot;color&quot;:8,&quot;term&quot;:2,&quot;trait&quot;:0,&quot;power&quot;:500,&quot;legacy&quot;:4,&quot;anyNumCopies&quot;:false,&quot;orderTable&quot;:171,&quot;orderDeck&quot;:20}," calcext:value-type="string">
            <text:p>{"id":"2-39","name":"陳寿","displayName":"陳寿","kana":"ちんじゅ","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rarity":1,"type":1,"level":1,"color":8,"term":2,"trait":0,"power":500,"legacy":4,"anyNumCopies":false,"orderTable":171,"orderDeck":20},</text:p>
          </table:table-cell>
          <table:table-cell table:number-columns-repeated="16356"/>
        </table:table-row>
        <table:table-row table:style-name="ro2">
          <table:table-cell table:style-name="ce11" office:value-type="float" office:value="172" calcext:value-type="float">
            <text:p>172</text:p>
          </table:table-cell>
          <table:table-cell table:style-name="ce11" office:value-type="float" office:value="21" calcext:value-type="float">
            <text:p>21</text:p>
          </table:table-cell>
          <table:table-cell table:style-name="ce21" office:value-type="string" calcext:value-type="string">
            <text:p>2-40</text:p>
          </table:table-cell>
          <table:table-cell table:style-name="ce21" office:value-type="float" office:value="40" calcext:value-type="float">
            <text:p>40</text:p>
          </table:table-cell>
          <table:table-cell table:style-name="ce11" office:value-type="string" calcext:value-type="string">
            <text:p>足利尊氏</text:p>
          </table:table-cell>
          <table:table-cell table:style-name="ce11" table:formula="of:=[.E173]" office:value-type="string" office:string-value="足利尊氏" calcext:value-type="string">
            <text:p>足利尊氏</text:p>
          </table:table-cell>
          <table:table-cell table:style-name="ce11" office:value-type="string" calcext:value-type="string">
            <text:p>あしかがたかうじ</text:p>
          </table:table-cell>
          <table:table-cell table:style-name="ce11" office:value-type="string" calcext:value-type="string">
            <text:p>第２弾ブースターパック</text:p>
          </table:table-cell>
          <table:table-cell table:style-name="ce11" table:formula="of:=VLOOKUP([.H173];[$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7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3];[$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73];[$特性番号.$A$1:$特性番号.$B$8];2;0);0)" office:value-type="float" office:value="0" calcext:value-type="float">
            <text:p>0</text:p>
          </table:table-cell>
          <table:table-cell table:style-name="ce11" office:value-type="string" calcext:value-type="string">
            <text:p>イジンが相手の戦場に置かれるたび、戦場の「即応」を持つイジン1体を指定して発動できる。そのイジンを寝かせ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0.png</text:p>
          </table:table-cell>
          <table:table-cell table:style-name="ce11" table:formula="of:=CONCATENATE([$JSON.$A$1];[.$C173];[$JSON.$B$1];[.$E173];[$JSON.$C$1];[.F173];[$JSON.$D$1];[.$G173];[$JSON.$E$1];IF(ISNA([.$T173]);&quot;null&quot;;&quot;&quot;&quot;&quot;&amp;[.$T173]&amp;&quot;&quot;&quot;&quot;);[$JSON.$F$1];[.$V173];[$JSON.$G$1];IF(ISNA([.$X173]);&quot;null&quot;;&quot;&quot;&quot;&quot;&amp;[.$X173]&amp;&quot;&quot;&quot;&quot;);[$JSON.$H$1];[.$AA173];[$JSON.$I$1];[.$I173];[$JSON.$J$1];[.K173];[$JSON.$K$1];[.$M173];[$JSON.$L$1];[.$P173];[$JSON.$M$1];[.$O173];[$JSON.$N$1];[.$S173];[$JSON.$O$1];[.$U173];[$JSON.$P$1];IF(ISNA([.$W173]);&quot;null&quot;;[.$W173]);[$JSON.$Q$1];[.$Y173];[$JSON.$R$1];IF([.$Z173];&quot;true&quot;;&quot;false&quot;);[$JSON.$S$1];[.$A173];[$JSON.$T$1];[.$B173];[$JSON.$U$1])" office:value-type="string" office:string-value="{&quot;id&quot;:&quot;2-40&quot;,&quot;name&quot;:&quot;足利尊氏&quot;,&quot;displayName&quot;:&quot;足利尊氏&quot;,&quot;kana&quot;:&quot;あしかがたかうじ&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rarity&quot;:1,&quot;type&quot;:1,&quot;level&quot;:1,&quot;color&quot;:8,&quot;term&quot;:0,&quot;trait&quot;:0,&quot;power&quot;:1000,&quot;legacy&quot;:4,&quot;anyNumCopies&quot;:false,&quot;orderTable&quot;:172,&quot;orderDeck&quot;:21}," calcext:value-type="string">
            <text:p>{"id":"2-40","name":"足利尊氏","displayName":"足利尊氏","kana":"あしかがたかうじ","traitText":null,"ruleText":"イジンが相手の戦場に置かれるたび、戦場の「即応」を持つイジン1体を指定して発動できる。そのイジンを寝かせる。","legacyText":"1ドローする","imageUrl":"https://one-draw.jp/ijinden/cardlist/002/card/02_040.png","expansion":25,"rarity":1,"type":1,"level":1,"color":8,"term":0,"trait":0,"power":1000,"legacy":4,"anyNumCopies":false,"orderTable":172,"orderDeck":21},</text:p>
          </table:table-cell>
          <table:table-cell table:number-columns-repeated="16356"/>
        </table:table-row>
        <table:table-row table:style-name="ro2">
          <table:table-cell table:style-name="ce11" office:value-type="float" office:value="173" calcext:value-type="float">
            <text:p>173</text:p>
          </table:table-cell>
          <table:table-cell table:style-name="ce11" office:value-type="float" office:value="22" calcext:value-type="float">
            <text:p>22</text:p>
          </table:table-cell>
          <table:table-cell table:style-name="ce21" office:value-type="string" calcext:value-type="string">
            <text:p>2-41</text:p>
          </table:table-cell>
          <table:table-cell table:style-name="ce21" office:value-type="float" office:value="41" calcext:value-type="float">
            <text:p>41</text:p>
          </table:table-cell>
          <table:table-cell table:style-name="ce11" office:value-type="string" calcext:value-type="string">
            <text:p>カール・マルクス</text:p>
          </table:table-cell>
          <table:table-cell table:style-name="ce11" table:formula="of:=[.E174]" office:value-type="string" office:string-value="カール・マルクス" calcext:value-type="string">
            <text:p>カール・マルクス</text:p>
          </table:table-cell>
          <table:table-cell table:style-name="ce11" office:value-type="string" calcext:value-type="string">
            <text:p>かーるまるくす</text:p>
          </table:table-cell>
          <table:table-cell table:style-name="ce11" office:value-type="string" calcext:value-type="string">
            <text:p>第２弾ブースターパック</text:p>
          </table:table-cell>
          <table:table-cell table:style-name="ce11" table:formula="of:=VLOOKUP([.H174];[$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7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4];[$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4];[$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74];[$特性番号.$A$1:$特性番号.$B$8];2;0);0)" office:value-type="float" office:value="0" calcext:value-type="float">
            <text:p>0</text:p>
          </table:table-cell>
          <table:table-cell table:style-name="ce11" office:value-type="string" calcext:value-type="string">
            <text:p>自分のメインフェイズが開始したとき、自分の手札の『ストーン』マリョク1つを相手に見せて発動できる。マリョク配置権+1する。</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17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1.png</text:p>
          </table:table-cell>
          <table:table-cell table:style-name="ce11" table:formula="of:=CONCATENATE([$JSON.$A$1];[.$C174];[$JSON.$B$1];[.$E174];[$JSON.$C$1];[.F174];[$JSON.$D$1];[.$G174];[$JSON.$E$1];IF(ISNA([.$T174]);&quot;null&quot;;&quot;&quot;&quot;&quot;&amp;[.$T174]&amp;&quot;&quot;&quot;&quot;);[$JSON.$F$1];[.$V174];[$JSON.$G$1];IF(ISNA([.$X174]);&quot;null&quot;;&quot;&quot;&quot;&quot;&amp;[.$X174]&amp;&quot;&quot;&quot;&quot;);[$JSON.$H$1];[.$AA174];[$JSON.$I$1];[.$I174];[$JSON.$J$1];[.K174];[$JSON.$K$1];[.$M174];[$JSON.$L$1];[.$P174];[$JSON.$M$1];[.$O174];[$JSON.$N$1];[.$S174];[$JSON.$O$1];[.$U174];[$JSON.$P$1];IF(ISNA([.$W174]);&quot;null&quot;;[.$W174]);[$JSON.$Q$1];[.$Y174];[$JSON.$R$1];IF([.$Z174];&quot;true&quot;;&quot;false&quot;);[$JSON.$S$1];[.$A174];[$JSON.$T$1];[.$B174];[$JSON.$U$1])" office:value-type="string" office:string-value="{&quot;id&quot;:&quot;2-41&quot;,&quot;name&quot;:&quot;カール・マルクス&quot;,&quot;displayName&quot;:&quot;カール・マルクス&quot;,&quot;kana&quot;:&quot;かーるまるくす&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rarity&quot;:1,&quot;type&quot;:1,&quot;level&quot;:1,&quot;color&quot;:8,&quot;term&quot;:0,&quot;trait&quot;:0,&quot;power&quot;:500,&quot;legacy&quot;:6,&quot;anyNumCopies&quot;:false,&quot;orderTable&quot;:173,&quot;orderDeck&quot;:22}," calcext:value-type="string">
            <text:p>{"id":"2-41","name":"カール・マルクス","displayName":"カール・マルクス","kana":"かーるまるくす","traitText":null,"ruleText":"自分のメインフェイズが開始したとき、自分の手札の『ストーン』マリョク1つを相手に見せて発動できる。マリョク配置権+1する。","legacyText":"反魂","imageUrl":"https://one-draw.jp/ijinden/cardlist/002/card/02_041.png","expansion":25,"rarity":1,"type":1,"level":1,"color":8,"term":0,"trait":0,"power":500,"legacy":6,"anyNumCopies":false,"orderTable":173,"orderDeck":22},</text:p>
          </table:table-cell>
          <table:table-cell table:number-columns-repeated="16356"/>
        </table:table-row>
        <table:table-row table:style-name="ro2">
          <table:table-cell table:style-name="ce11" office:value-type="float" office:value="174" calcext:value-type="float">
            <text:p>174</text:p>
          </table:table-cell>
          <table:table-cell table:style-name="ce11" office:value-type="float" office:value="120" calcext:value-type="float">
            <text:p>120</text:p>
          </table:table-cell>
          <table:table-cell table:style-name="ce21" office:value-type="string" calcext:value-type="string">
            <text:p>2-42</text:p>
          </table:table-cell>
          <table:table-cell table:style-name="ce21" office:value-type="float" office:value="42" calcext:value-type="float">
            <text:p>42</text:p>
          </table:table-cell>
          <table:table-cell table:style-name="ce11" office:value-type="string" calcext:value-type="string">
            <text:p>足利義満</text:p>
          </table:table-cell>
          <table:table-cell table:style-name="ce11" table:formula="of:=[.E175]" office:value-type="string" office:string-value="足利義満" calcext:value-type="string">
            <text:p>足利義満</text:p>
          </table:table-cell>
          <table:table-cell table:style-name="ce11" office:value-type="string" calcext:value-type="string">
            <text:p>あしかがよしみつ</text:p>
          </table:table-cell>
          <table:table-cell table:style-name="ce11" office:value-type="string" calcext:value-type="string">
            <text:p>第２弾ブースターパック</text:p>
          </table:table-cell>
          <table:table-cell table:style-name="ce11" table:formula="of:=VLOOKUP([.H175];[$収録番号.$A$1:$収録番号.$B$10];2;0)" office:value-type="float" office:value="25" calcext:value-type="float">
            <text:p>25</text:p>
          </table:table-cell>
          <table:table-cell table:style-name="ce11" office:value-type="string" calcext:value-type="string">
            <text:p>R</text:p>
          </table:table-cell>
          <table:table-cell table:style-name="ce11" table:formula="of:=VLOOKUP([.J17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5];[$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5];[$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75];[$特性番号.$A$1:$特性番号.$B$8];2;0);0)" office:value-type="float" office:value="0" calcext:value-type="float">
            <text:p>0</text:p>
          </table:table-cell>
          <table:table-cell table:style-name="ce11"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2.png</text:p>
          </table:table-cell>
          <table:table-cell table:style-name="ce11" table:formula="of:=CONCATENATE([$JSON.$A$1];[.$C175];[$JSON.$B$1];[.$E175];[$JSON.$C$1];[.F175];[$JSON.$D$1];[.$G175];[$JSON.$E$1];IF(ISNA([.$T175]);&quot;null&quot;;&quot;&quot;&quot;&quot;&amp;[.$T175]&amp;&quot;&quot;&quot;&quot;);[$JSON.$F$1];[.$V175];[$JSON.$G$1];IF(ISNA([.$X175]);&quot;null&quot;;&quot;&quot;&quot;&quot;&amp;[.$X175]&amp;&quot;&quot;&quot;&quot;);[$JSON.$H$1];[.$AA175];[$JSON.$I$1];[.$I175];[$JSON.$J$1];[.K175];[$JSON.$K$1];[.$M175];[$JSON.$L$1];[.$P175];[$JSON.$M$1];[.$O175];[$JSON.$N$1];[.$S175];[$JSON.$O$1];[.$U175];[$JSON.$P$1];IF(ISNA([.$W175]);&quot;null&quot;;[.$W175]);[$JSON.$Q$1];[.$Y175];[$JSON.$R$1];IF([.$Z175];&quot;true&quot;;&quot;false&quot;);[$JSON.$S$1];[.$A175];[$JSON.$T$1];[.$B175];[$JSON.$U$1])" office:value-type="string" office:string-value="{&quot;id&quot;:&quot;2-42&quot;,&quot;name&quot;:&quot;足利義満&quot;,&quot;displayName&quot;:&quot;足利義満&quot;,&quot;kana&quot;:&quot;あしかがよしみつ&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rarity&quot;:2,&quot;type&quot;:1,&quot;level&quot;:3,&quot;color&quot;:8,&quot;term&quot;:0,&quot;trait&quot;:0,&quot;power&quot;:2000,&quot;legacy&quot;:4,&quot;anyNumCopies&quot;:false,&quot;orderTable&quot;:174,&quot;orderDeck&quot;:120}," calcext:value-type="string">
            <text:p>{"id":"2-42","name":"足利義満","displayName":"足利義満","kana":"あしかがよしみつ","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rarity":2,"type":1,"level":3,"color":8,"term":0,"trait":0,"power":2000,"legacy":4,"anyNumCopies":false,"orderTable":174,"orderDeck":120},</text:p>
          </table:table-cell>
          <table:table-cell table:number-columns-repeated="16356"/>
        </table:table-row>
        <table:table-row table:style-name="ro2">
          <table:table-cell table:style-name="ce11" office:value-type="float" office:value="175" calcext:value-type="float">
            <text:p>175</text:p>
          </table:table-cell>
          <table:table-cell table:style-name="ce11" office:value-type="float" office:value="121" calcext:value-type="float">
            <text:p>121</text:p>
          </table:table-cell>
          <table:table-cell table:style-name="ce21" office:value-type="string" calcext:value-type="string">
            <text:p>2-43</text:p>
          </table:table-cell>
          <table:table-cell table:style-name="ce21" office:value-type="float" office:value="43" calcext:value-type="float">
            <text:p>43</text:p>
          </table:table-cell>
          <table:table-cell table:style-name="ce11" office:value-type="string" calcext:value-type="string">
            <text:p>観阿弥</text:p>
          </table:table-cell>
          <table:table-cell table:style-name="ce11" table:formula="of:=[.E176]" office:value-type="string" office:string-value="観阿弥" calcext:value-type="string">
            <text:p>観阿弥</text:p>
          </table:table-cell>
          <table:table-cell table:style-name="ce11" office:value-type="string" calcext:value-type="string">
            <text:p>かんあみ</text:p>
          </table:table-cell>
          <table:table-cell table:style-name="ce11" office:value-type="string" calcext:value-type="string">
            <text:p>第２弾ブースターパック</text:p>
          </table:table-cell>
          <table:table-cell table:style-name="ce11" table:formula="of:=VLOOKUP([.H176];[$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6];[$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6];[$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76];[$特性番号.$A$1:$特性番号.$B$8];2;0);0)" office:value-type="float" office:value="0" calcext:value-type="float">
            <text:p>0</text:p>
          </table:table-cell>
          <table:table-cell table:style-name="ce11" office:value-type="string" calcext:value-type="string">
            <text:p>ウォッチャー¶レベル4以上のイジンが自分の戦場にいる間「パワー+2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3.png</text:p>
          </table:table-cell>
          <table:table-cell table:style-name="ce11" table:formula="of:=CONCATENATE([$JSON.$A$1];[.$C176];[$JSON.$B$1];[.$E176];[$JSON.$C$1];[.F176];[$JSON.$D$1];[.$G176];[$JSON.$E$1];IF(ISNA([.$T176]);&quot;null&quot;;&quot;&quot;&quot;&quot;&amp;[.$T176]&amp;&quot;&quot;&quot;&quot;);[$JSON.$F$1];[.$V176];[$JSON.$G$1];IF(ISNA([.$X176]);&quot;null&quot;;&quot;&quot;&quot;&quot;&amp;[.$X176]&amp;&quot;&quot;&quot;&quot;);[$JSON.$H$1];[.$AA176];[$JSON.$I$1];[.$I176];[$JSON.$J$1];[.K176];[$JSON.$K$1];[.$M176];[$JSON.$L$1];[.$P176];[$JSON.$M$1];[.$O176];[$JSON.$N$1];[.$S176];[$JSON.$O$1];[.$U176];[$JSON.$P$1];IF(ISNA([.$W176]);&quot;null&quot;;[.$W176]);[$JSON.$Q$1];[.$Y176];[$JSON.$R$1];IF([.$Z176];&quot;true&quot;;&quot;false&quot;);[$JSON.$S$1];[.$A176];[$JSON.$T$1];[.$B176];[$JSON.$U$1])" office:value-type="string" office:string-value="{&quot;id&quot;:&quot;2-43&quot;,&quot;name&quot;:&quot;観阿弥&quot;,&quot;displayName&quot;:&quot;観阿弥&quot;,&quot;kana&quot;:&quot;かんあみ&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rarity&quot;:1,&quot;type&quot;:1,&quot;level&quot;:3,&quot;color&quot;:8,&quot;term&quot;:0,&quot;trait&quot;:0,&quot;power&quot;:2000,&quot;legacy&quot;:4,&quot;anyNumCopies&quot;:false,&quot;orderTable&quot;:175,&quot;orderDeck&quot;:121}," calcext:value-type="string">
            <text:p>{"id":"2-43","name":"観阿弥","displayName":"観阿弥","kana":"かんあみ","traitText":null,"ruleText":"ウォッチャー¶レベル4以上のイジンが自分の戦場にいる間「パワー+2000」を得る。","legacyText":"1ドローする","imageUrl":"https://one-draw.jp/ijinden/cardlist/002/card/02_043.png","expansion":25,"rarity":1,"type":1,"level":3,"color":8,"term":0,"trait":0,"power":2000,"legacy":4,"anyNumCopies":false,"orderTable":175,"orderDeck":121},</text:p>
          </table:table-cell>
          <table:table-cell table:number-columns-repeated="16356"/>
        </table:table-row>
        <table:table-row table:style-name="ro2">
          <table:table-cell table:style-name="ce11" office:value-type="float" office:value="176" calcext:value-type="float">
            <text:p>176</text:p>
          </table:table-cell>
          <table:table-cell table:style-name="ce11" office:value-type="float" office:value="169" calcext:value-type="float">
            <text:p>169</text:p>
          </table:table-cell>
          <table:table-cell table:style-name="ce21" office:value-type="string" calcext:value-type="string">
            <text:p>2-44</text:p>
          </table:table-cell>
          <table:table-cell table:style-name="ce21" office:value-type="float" office:value="44" calcext:value-type="float">
            <text:p>44</text:p>
          </table:table-cell>
          <table:table-cell table:style-name="ce11" office:value-type="string" calcext:value-type="string">
            <text:p>世阿弥</text:p>
          </table:table-cell>
          <table:table-cell table:style-name="ce11" table:formula="of:=[.E177]" office:value-type="string" office:string-value="世阿弥" calcext:value-type="string">
            <text:p>世阿弥</text:p>
          </table:table-cell>
          <table:table-cell table:style-name="ce11" office:value-type="string" calcext:value-type="string">
            <text:p>ぜあみ</text:p>
          </table:table-cell>
          <table:table-cell table:style-name="ce11" office:value-type="string" calcext:value-type="string">
            <text:p>第２弾ブースターパック</text:p>
          </table:table-cell>
          <table:table-cell table:style-name="ce11" table:formula="of:=VLOOKUP([.H177];[$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7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7];[$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7];[$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77];[$特性番号.$A$1:$特性番号.$B$8];2;0);0)" office:value-type="float" office:value="0" calcext:value-type="float">
            <text:p>0</text:p>
          </table:table-cell>
          <table:table-cell table:style-name="ce11" office:value-type="string" calcext:value-type="string">
            <text:p>ウォッチャー¶レベル3以下のイジンが自分の戦場にいる間「即応 パワー+2000」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17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4.png</text:p>
          </table:table-cell>
          <table:table-cell table:style-name="ce11" table:formula="of:=CONCATENATE([$JSON.$A$1];[.$C177];[$JSON.$B$1];[.$E177];[$JSON.$C$1];[.F177];[$JSON.$D$1];[.$G177];[$JSON.$E$1];IF(ISNA([.$T177]);&quot;null&quot;;&quot;&quot;&quot;&quot;&amp;[.$T177]&amp;&quot;&quot;&quot;&quot;);[$JSON.$F$1];[.$V177];[$JSON.$G$1];IF(ISNA([.$X177]);&quot;null&quot;;&quot;&quot;&quot;&quot;&amp;[.$X177]&amp;&quot;&quot;&quot;&quot;);[$JSON.$H$1];[.$AA177];[$JSON.$I$1];[.$I177];[$JSON.$J$1];[.K177];[$JSON.$K$1];[.$M177];[$JSON.$L$1];[.$P177];[$JSON.$M$1];[.$O177];[$JSON.$N$1];[.$S177];[$JSON.$O$1];[.$U177];[$JSON.$P$1];IF(ISNA([.$W177]);&quot;null&quot;;[.$W177]);[$JSON.$Q$1];[.$Y177];[$JSON.$R$1];IF([.$Z177];&quot;true&quot;;&quot;false&quot;);[$JSON.$S$1];[.$A177];[$JSON.$T$1];[.$B177];[$JSON.$U$1])" office:value-type="string" office:string-value="{&quot;id&quot;:&quot;2-44&quot;,&quot;name&quot;:&quot;世阿弥&quot;,&quot;displayName&quot;:&quot;世阿弥&quot;,&quot;kana&quot;:&quot;ぜあみ&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rarity&quot;:1,&quot;type&quot;:1,&quot;level&quot;:4,&quot;color&quot;:8,&quot;term&quot;:0,&quot;trait&quot;:0,&quot;power&quot;:2000,&quot;legacy&quot;:4,&quot;anyNumCopies&quot;:false,&quot;orderTable&quot;:176,&quot;orderDeck&quot;:169}," calcext:value-type="string">
            <text:p>{"id":"2-44","name":"世阿弥","displayName":"世阿弥","kana":"ぜあみ","traitText":null,"ruleText":"ウォッチャー¶レベル3以下のイジンが自分の戦場にいる間「即応 パワー+2000」を得る。","legacyText":"1ドローする","imageUrl":"https://one-draw.jp/ijinden/cardlist/002/card/02_044.png","expansion":25,"rarity":1,"type":1,"level":4,"color":8,"term":0,"trait":0,"power":2000,"legacy":4,"anyNumCopies":false,"orderTable":176,"orderDeck":169},</text:p>
          </table:table-cell>
          <table:table-cell table:number-columns-repeated="16356"/>
        </table:table-row>
        <table:table-row table:style-name="ro2">
          <table:table-cell table:style-name="ce11" office:value-type="float" office:value="177" calcext:value-type="float">
            <text:p>177</text:p>
          </table:table-cell>
          <table:table-cell table:style-name="ce11" office:value-type="float" office:value="69" calcext:value-type="float">
            <text:p>69</text:p>
          </table:table-cell>
          <table:table-cell table:style-name="ce21" office:value-type="string" calcext:value-type="string">
            <text:p>2-45</text:p>
          </table:table-cell>
          <table:table-cell table:style-name="ce21" office:value-type="float" office:value="45" calcext:value-type="float">
            <text:p>45</text:p>
          </table:table-cell>
          <table:table-cell table:style-name="ce11" office:value-type="string" calcext:value-type="string">
            <text:p>新井白石</text:p>
          </table:table-cell>
          <table:table-cell table:style-name="ce11" table:formula="of:=[.E178]" office:value-type="string" office:string-value="新井白石" calcext:value-type="string">
            <text:p>新井白石</text:p>
          </table:table-cell>
          <table:table-cell table:style-name="ce11" office:value-type="string" calcext:value-type="string">
            <text:p>あらいはくせき</text:p>
          </table:table-cell>
          <table:table-cell table:style-name="ce11" office:value-type="string" calcext:value-type="string">
            <text:p>第２弾ブースターパック</text:p>
          </table:table-cell>
          <table:table-cell table:style-name="ce11" table:formula="of:=VLOOKUP([.H178];[$収録番号.$A$1:$収録番号.$B$10];2;0)" office:value-type="float" office:value="25" calcext:value-type="float">
            <text:p>25</text:p>
          </table:table-cell>
          <table:table-cell table:style-name="ce11" office:value-type="string" calcext:value-type="string">
            <text:p>R</text:p>
          </table:table-cell>
          <table:table-cell table:style-name="ce11" table:formula="of:=VLOOKUP([.J17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178];[$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8];[$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78];[$特性番号.$A$1:$特性番号.$B$8];2;0);0)" office:value-type="float" office:value="0" calcext:value-type="float">
            <text:p>0</text:p>
          </table:table-cell>
          <table:table-cell table:style-name="ce11"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5.png</text:p>
          </table:table-cell>
          <table:table-cell table:style-name="ce11" table:formula="of:=CONCATENATE([$JSON.$A$1];[.$C178];[$JSON.$B$1];[.$E178];[$JSON.$C$1];[.F178];[$JSON.$D$1];[.$G178];[$JSON.$E$1];IF(ISNA([.$T178]);&quot;null&quot;;&quot;&quot;&quot;&quot;&amp;[.$T178]&amp;&quot;&quot;&quot;&quot;);[$JSON.$F$1];[.$V178];[$JSON.$G$1];IF(ISNA([.$X178]);&quot;null&quot;;&quot;&quot;&quot;&quot;&amp;[.$X178]&amp;&quot;&quot;&quot;&quot;);[$JSON.$H$1];[.$AA178];[$JSON.$I$1];[.$I178];[$JSON.$J$1];[.K178];[$JSON.$K$1];[.$M178];[$JSON.$L$1];[.$P178];[$JSON.$M$1];[.$O178];[$JSON.$N$1];[.$S178];[$JSON.$O$1];[.$U178];[$JSON.$P$1];IF(ISNA([.$W178]);&quot;null&quot;;[.$W178]);[$JSON.$Q$1];[.$Y178];[$JSON.$R$1];IF([.$Z178];&quot;true&quot;;&quot;false&quot;);[$JSON.$S$1];[.$A178];[$JSON.$T$1];[.$B178];[$JSON.$U$1])" office:value-type="string" office:string-value="{&quot;id&quot;:&quot;2-45&quot;,&quot;name&quot;:&quot;新井白石&quot;,&quot;displayName&quot;:&quot;新井白石&quot;,&quot;kana&quot;:&quot;あらいはくせき&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rarity&quot;:2,&quot;type&quot;:1,&quot;level&quot;:2,&quot;color&quot;:8,&quot;term&quot;:0,&quot;trait&quot;:0,&quot;power&quot;:1000,&quot;legacy&quot;:4,&quot;anyNumCopies&quot;:false,&quot;orderTable&quot;:177,&quot;orderDeck&quot;:69}," calcext:value-type="string">
            <text:p>{"id":"2-45","name":"新井白石","displayName":"新井白石","kana":"あらいはくせき","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rarity":2,"type":1,"level":2,"color":8,"term":0,"trait":0,"power":1000,"legacy":4,"anyNumCopies":false,"orderTable":177,"orderDeck":69},</text:p>
          </table:table-cell>
          <table:table-cell table:number-columns-repeated="16356"/>
        </table:table-row>
        <table:table-row table:style-name="ro2">
          <table:table-cell table:style-name="ce11" office:value-type="float" office:value="178" calcext:value-type="float">
            <text:p>178</text:p>
          </table:table-cell>
          <table:table-cell table:style-name="ce11" office:value-type="float" office:value="170" calcext:value-type="float">
            <text:p>170</text:p>
          </table:table-cell>
          <table:table-cell table:style-name="ce21" office:value-type="string" calcext:value-type="string">
            <text:p>2-46</text:p>
          </table:table-cell>
          <table:table-cell table:style-name="ce21" office:value-type="float" office:value="46" calcext:value-type="float">
            <text:p>46</text:p>
          </table:table-cell>
          <table:table-cell table:style-name="ce11" office:value-type="string" calcext:value-type="string">
            <text:p>孫夫人</text:p>
          </table:table-cell>
          <table:table-cell table:style-name="ce11" table:formula="of:=[.E179]" office:value-type="string" office:string-value="孫夫人" calcext:value-type="string">
            <text:p>孫夫人</text:p>
          </table:table-cell>
          <table:table-cell table:style-name="ce11" office:value-type="string" calcext:value-type="string">
            <text:p>そんふじん</text:p>
          </table:table-cell>
          <table:table-cell table:style-name="ce11" office:value-type="string" calcext:value-type="string">
            <text:p>第２弾ブースターパック</text:p>
          </table:table-cell>
          <table:table-cell table:style-name="ce11" table:formula="of:=VLOOKUP([.H179];[$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79];[$種類番号.$A$1:$種類番号.$B$4];2;0)" office:value-type="float" office:value="1" calcext:value-type="float">
            <text:p>1</text:p>
          </table:table-cell>
          <table:table-cell table:style-name="ce11" office:value-type="string" calcext:value-type="string">
            <text:p>黄</text:p>
          </table:table-cell>
          <table:table-cell table:style-name="ce11" table:formula="of:=VLOOKUP([.N179];[$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7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79];[$特性番号.$A$1:$特性番号.$B$8];2;0);0)" office:value-type="float" office:value="0" calcext:value-type="float">
            <text:p>0</text:p>
          </table:table-cell>
          <table:table-cell table:style-name="ce11"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17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6.png</text:p>
          </table:table-cell>
          <table:table-cell table:style-name="ce11" table:formula="of:=CONCATENATE([$JSON.$A$1];[.$C179];[$JSON.$B$1];[.$E179];[$JSON.$C$1];[.F179];[$JSON.$D$1];[.$G179];[$JSON.$E$1];IF(ISNA([.$T179]);&quot;null&quot;;&quot;&quot;&quot;&quot;&amp;[.$T179]&amp;&quot;&quot;&quot;&quot;);[$JSON.$F$1];[.$V179];[$JSON.$G$1];IF(ISNA([.$X179]);&quot;null&quot;;&quot;&quot;&quot;&quot;&amp;[.$X179]&amp;&quot;&quot;&quot;&quot;);[$JSON.$H$1];[.$AA179];[$JSON.$I$1];[.$I179];[$JSON.$J$1];[.K179];[$JSON.$K$1];[.$M179];[$JSON.$L$1];[.$P179];[$JSON.$M$1];[.$O179];[$JSON.$N$1];[.$S179];[$JSON.$O$1];[.$U179];[$JSON.$P$1];IF(ISNA([.$W179]);&quot;null&quot;;[.$W179]);[$JSON.$Q$1];[.$Y179];[$JSON.$R$1];IF([.$Z179];&quot;true&quot;;&quot;false&quot;);[$JSON.$S$1];[.$A179];[$JSON.$T$1];[.$B179];[$JSON.$U$1])" office:value-type="string" office:string-value="{&quot;id&quot;:&quot;2-46&quot;,&quot;name&quot;:&quot;孫夫人&quot;,&quot;displayName&quot;:&quot;孫夫人&quot;,&quot;kana&quot;:&quot;そんふじん&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rarity&quot;:1,&quot;type&quot;:1,&quot;level&quot;:4,&quot;color&quot;:8,&quot;term&quot;:0,&quot;trait&quot;:0,&quot;power&quot;:1000,&quot;legacy&quot;:4,&quot;anyNumCopies&quot;:false,&quot;orderTable&quot;:178,&quot;orderDeck&quot;:170}," calcext:value-type="string">
            <text:p>{"id":"2-46","name":"孫夫人","displayName":"孫夫人","kana":"そんふじん","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rarity":1,"type":1,"level":4,"color":8,"term":0,"trait":0,"power":1000,"legacy":4,"anyNumCopies":false,"orderTable":178,"orderDeck":170},</text:p>
          </table:table-cell>
          <table:table-cell table:number-columns-repeated="16356"/>
        </table:table-row>
        <table:table-row table:style-name="ro2">
          <table:table-cell table:style-name="ce11" office:value-type="float" office:value="179" calcext:value-type="float">
            <text:p>179</text:p>
          </table:table-cell>
          <table:table-cell table:style-name="ce11" office:value-type="float" office:value="122" calcext:value-type="float">
            <text:p>122</text:p>
          </table:table-cell>
          <table:table-cell table:style-name="ce21" office:value-type="string" calcext:value-type="string">
            <text:p>2-47</text:p>
          </table:table-cell>
          <table:table-cell table:style-name="ce21" office:value-type="float" office:value="47" calcext:value-type="float">
            <text:p>47</text:p>
          </table:table-cell>
          <table:table-cell table:style-name="ce11" office:value-type="string" calcext:value-type="string">
            <text:p>法然</text:p>
          </table:table-cell>
          <table:table-cell table:style-name="ce11" table:formula="of:=[.E180]" office:value-type="string" office:string-value="法然" calcext:value-type="string">
            <text:p>法然</text:p>
          </table:table-cell>
          <table:table-cell table:style-name="ce11" office:value-type="string" calcext:value-type="string">
            <text:p>ほうねん</text:p>
          </table:table-cell>
          <table:table-cell table:style-name="ce11" office:value-type="string" calcext:value-type="string">
            <text:p>第２弾ブースターパック</text:p>
          </table:table-cell>
          <table:table-cell table:style-name="ce11" table:formula="of:=VLOOKUP([.H180];[$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8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0];[$種類番号.$A$1:$種類番号.$B$4];2;0)" office:value-type="float" office:value="1" calcext:value-type="float">
            <text:p>1</text:p>
          </table:table-cell>
          <table:table-cell table:style-name="ce11" office:value-type="string" calcext:value-type="string">
            <text:p>黄</text:p>
          </table:table-cell>
          <table:table-cell table:style-name="ce11" table:formula="of:=VLOOKUP([.N180];[$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80];[$特性番号.$A$1:$特性番号.$B$8];2;0);0)" office:value-type="float" office:value="0" calcext:value-type="float">
            <text:p>0</text:p>
          </table:table-cell>
          <table:table-cell table:style-name="ce11"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table:style-name="ce11" office:value-type="float" office:value="2000" calcext:value-type="float">
            <text:p>2000</text:p>
          </table:table-cell>
          <table:table-cell table:style-name="ce25" office:value-type="string" calcext:value-type="string">
            <text:p>山札の上か下に戻す</text:p>
          </table:table-cell>
          <table:table-cell table:style-name="ce11" table:formula="of:=IFERROR(VLOOKUP([.$X18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7.png</text:p>
          </table:table-cell>
          <table:table-cell table:style-name="ce11" table:formula="of:=CONCATENATE([$JSON.$A$1];[.$C180];[$JSON.$B$1];[.$E180];[$JSON.$C$1];[.F180];[$JSON.$D$1];[.$G180];[$JSON.$E$1];IF(ISNA([.$T180]);&quot;null&quot;;&quot;&quot;&quot;&quot;&amp;[.$T180]&amp;&quot;&quot;&quot;&quot;);[$JSON.$F$1];[.$V180];[$JSON.$G$1];IF(ISNA([.$X180]);&quot;null&quot;;&quot;&quot;&quot;&quot;&amp;[.$X180]&amp;&quot;&quot;&quot;&quot;);[$JSON.$H$1];[.$AA180];[$JSON.$I$1];[.$I180];[$JSON.$J$1];[.K180];[$JSON.$K$1];[.$M180];[$JSON.$L$1];[.$P180];[$JSON.$M$1];[.$O180];[$JSON.$N$1];[.$S180];[$JSON.$O$1];[.$U180];[$JSON.$P$1];IF(ISNA([.$W180]);&quot;null&quot;;[.$W180]);[$JSON.$Q$1];[.$Y180];[$JSON.$R$1];IF([.$Z180];&quot;true&quot;;&quot;false&quot;);[$JSON.$S$1];[.$A180];[$JSON.$T$1];[.$B180];[$JSON.$U$1])" office:value-type="string" office:string-value="{&quot;id&quot;:&quot;2-47&quot;,&quot;name&quot;:&quot;法然&quot;,&quot;displayName&quot;:&quot;法然&quot;,&quot;kana&quot;:&quot;ほうねん&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rarity&quot;:1,&quot;type&quot;:1,&quot;level&quot;:3,&quot;color&quot;:8,&quot;term&quot;:0,&quot;trait&quot;:0,&quot;power&quot;:2000,&quot;legacy&quot;:7,&quot;anyNumCopies&quot;:false,&quot;orderTable&quot;:179,&quot;orderDeck&quot;:122}," calcext:value-type="string">
            <text:p>{"id":"2-47","name":"法然","displayName":"法然","kana":"ほうねん","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rarity":1,"type":1,"level":3,"color":8,"term":0,"trait":0,"power":2000,"legacy":7,"anyNumCopies":false,"orderTable":179,"orderDeck":122},</text:p>
          </table:table-cell>
          <table:table-cell table:number-columns-repeated="16356"/>
        </table:table-row>
        <table:table-row table:style-name="ro2">
          <table:table-cell table:style-name="ce11" office:value-type="float" office:value="180" calcext:value-type="float">
            <text:p>180</text:p>
          </table:table-cell>
          <table:table-cell table:style-name="ce11" office:value-type="float" office:value="216" calcext:value-type="float">
            <text:p>216</text:p>
          </table:table-cell>
          <table:table-cell table:style-name="ce21" office:value-type="string" calcext:value-type="string">
            <text:p>2-48</text:p>
          </table:table-cell>
          <table:table-cell table:style-name="ce21" office:value-type="float" office:value="48" calcext:value-type="float">
            <text:p>48</text:p>
          </table:table-cell>
          <table:table-cell table:style-name="ce11" office:value-type="string" calcext:value-type="string">
            <text:p>一遍</text:p>
          </table:table-cell>
          <table:table-cell table:style-name="ce11" table:formula="of:=[.E181]" office:value-type="string" office:string-value="一遍" calcext:value-type="string">
            <text:p>一遍</text:p>
          </table:table-cell>
          <table:table-cell table:style-name="ce11" office:value-type="string" calcext:value-type="string">
            <text:p>いっぺん</text:p>
          </table:table-cell>
          <table:table-cell table:style-name="ce11" office:value-type="string" calcext:value-type="string">
            <text:p>第２弾ブースターパック</text:p>
          </table:table-cell>
          <table:table-cell table:style-name="ce11" table:formula="of:=VLOOKUP([.H181];[$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8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181];[$種類番号.$A$1:$種類番号.$B$4];2;0)" office:value-type="float" office:value="1" calcext:value-type="float">
            <text:p>1</text:p>
          </table:table-cell>
          <table:table-cell table:style-name="ce11" office:value-type="string" calcext:value-type="string">
            <text:p>黄</text:p>
          </table:table-cell>
          <table:table-cell table:style-name="ce11" table:formula="of:=VLOOKUP([.N181];[$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81];[$特性番号.$A$1:$特性番号.$B$8];2;0);0)" office:value-type="float" office:value="0" calcext:value-type="float">
            <text:p>0</text:p>
          </table:table-cell>
          <table:table-cell table:style-name="ce11" office:value-type="string" calcext:value-type="string">
            <text:p>カードが自分の墓地にない間「ウォッチャー」を得る。¶カードが相手の墓地にない間「トリプルプレッシャー」を得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181];[$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8.png</text:p>
          </table:table-cell>
          <table:table-cell table:style-name="ce11" table:formula="of:=CONCATENATE([$JSON.$A$1];[.$C181];[$JSON.$B$1];[.$E181];[$JSON.$C$1];[.F181];[$JSON.$D$1];[.$G181];[$JSON.$E$1];IF(ISNA([.$T181]);&quot;null&quot;;&quot;&quot;&quot;&quot;&amp;[.$T181]&amp;&quot;&quot;&quot;&quot;);[$JSON.$F$1];[.$V181];[$JSON.$G$1];IF(ISNA([.$X181]);&quot;null&quot;;&quot;&quot;&quot;&quot;&amp;[.$X181]&amp;&quot;&quot;&quot;&quot;);[$JSON.$H$1];[.$AA181];[$JSON.$I$1];[.$I181];[$JSON.$J$1];[.K181];[$JSON.$K$1];[.$M181];[$JSON.$L$1];[.$P181];[$JSON.$M$1];[.$O181];[$JSON.$N$1];[.$S181];[$JSON.$O$1];[.$U181];[$JSON.$P$1];IF(ISNA([.$W181]);&quot;null&quot;;[.$W181]);[$JSON.$Q$1];[.$Y181];[$JSON.$R$1];IF([.$Z181];&quot;true&quot;;&quot;false&quot;);[$JSON.$S$1];[.$A181];[$JSON.$T$1];[.$B181];[$JSON.$U$1])" office:value-type="string" office:string-value="{&quot;id&quot;:&quot;2-48&quot;,&quot;name&quot;:&quot;一遍&quot;,&quot;displayName&quot;:&quot;一遍&quot;,&quot;kana&quot;:&quot;いっぺん&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rarity&quot;:1,&quot;type&quot;:1,&quot;level&quot;:5,&quot;color&quot;:8,&quot;term&quot;:0,&quot;trait&quot;:0,&quot;power&quot;:5000,&quot;legacy&quot;:7,&quot;anyNumCopies&quot;:false,&quot;orderTable&quot;:180,&quot;orderDeck&quot;:216}," calcext:value-type="string">
            <text:p>{"id":"2-48","name":"一遍","displayName":"一遍","kana":"いっぺん","traitText":null,"ruleText":"カードが自分の墓地にない間「ウォッチャー」を得る。¶カードが相手の墓地にない間「トリプルプレッシャー」を得る。","legacyText":"山札の上か下に戻す","imageUrl":"https://one-draw.jp/ijinden/cardlist/002/card/02_048.png","expansion":25,"rarity":1,"type":1,"level":5,"color":8,"term":0,"trait":0,"power":5000,"legacy":7,"anyNumCopies":false,"orderTable":180,"orderDeck":216},</text:p>
          </table:table-cell>
          <table:table-cell table:number-columns-repeated="16356"/>
        </table:table-row>
        <table:table-row table:style-name="ro2">
          <table:table-cell table:style-name="ce11" office:value-type="float" office:value="181" calcext:value-type="float">
            <text:p>181</text:p>
          </table:table-cell>
          <table:table-cell table:style-name="ce11" office:value-type="float" office:value="304" calcext:value-type="float">
            <text:p>304</text:p>
          </table:table-cell>
          <table:table-cell table:style-name="ce21" office:value-type="string" calcext:value-type="string">
            <text:p>2-49</text:p>
          </table:table-cell>
          <table:table-cell table:style-name="ce21" office:value-type="float" office:value="49" calcext:value-type="float">
            <text:p>49</text:p>
          </table:table-cell>
          <table:table-cell table:style-name="ce11" office:value-type="string" calcext:value-type="string">
            <text:p>籠城戦</text:p>
          </table:table-cell>
          <table:table-cell table:style-name="ce11" table:formula="of:=[.E182]" office:value-type="string" office:string-value="籠城戦" calcext:value-type="string">
            <text:p>籠城戦</text:p>
          </table:table-cell>
          <table:table-cell table:style-name="ce11" office:value-type="string" calcext:value-type="string">
            <text:p>ろうじょうせん</text:p>
          </table:table-cell>
          <table:table-cell table:style-name="ce11" office:value-type="string" calcext:value-type="string">
            <text:p>第２弾ブースターパック</text:p>
          </table:table-cell>
          <table:table-cell table:style-name="ce11" table:formula="of:=VLOOKUP([.H182];[$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8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2];[$種類番号.$A$1:$種類番号.$B$4];2;0)" office:value-type="float" office:value="2" calcext:value-type="float">
            <text:p>2</text:p>
          </table:table-cell>
          <table:table-cell table:style-name="ce11" office:value-type="string" calcext:value-type="string">
            <text:p>赤</text:p>
          </table:table-cell>
          <table:table-cell table:style-name="ce11" table:formula="of:=VLOOKUP([.N18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182];[$能力語番号.$A$1:$能力語番号.$B$11];2;0);0)" office:value-type="float" office:value="4" calcext:value-type="float">
            <text:p>4</text:p>
          </table:table-cell>
          <table:table-cell table:formula="of:=NA()" office:value-type="string" office:string-value="" calcext:value-type="error">
            <text:p>#N/A</text:p>
          </table:table-cell>
          <table:table-cell table:style-name="ce11" table:formula="of:=IFERROR(VLOOKUP([.$T182];[$特性番号.$A$1:$特性番号.$B$8];2;0);0)" office:value-type="float" office:value="0" calcext:value-type="float">
            <text:p>0</text:p>
          </table:table-cell>
          <table:table-cell table:style-name="ce11"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8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49.png</text:p>
          </table:table-cell>
          <table:table-cell table:style-name="ce11" table:formula="of:=CONCATENATE([$JSON.$A$1];[.$C182];[$JSON.$B$1];[.$E182];[$JSON.$C$1];[.F182];[$JSON.$D$1];[.$G182];[$JSON.$E$1];IF(ISNA([.$T182]);&quot;null&quot;;&quot;&quot;&quot;&quot;&amp;[.$T182]&amp;&quot;&quot;&quot;&quot;);[$JSON.$F$1];[.$V182];[$JSON.$G$1];IF(ISNA([.$X182]);&quot;null&quot;;&quot;&quot;&quot;&quot;&amp;[.$X182]&amp;&quot;&quot;&quot;&quot;);[$JSON.$H$1];[.$AA182];[$JSON.$I$1];[.$I182];[$JSON.$J$1];[.K182];[$JSON.$K$1];[.$M182];[$JSON.$L$1];[.$P182];[$JSON.$M$1];[.$O182];[$JSON.$N$1];[.$S182];[$JSON.$O$1];[.$U182];[$JSON.$P$1];IF(ISNA([.$W182]);&quot;null&quot;;[.$W182]);[$JSON.$Q$1];[.$Y182];[$JSON.$R$1];IF([.$Z182];&quot;true&quot;;&quot;false&quot;);[$JSON.$S$1];[.$A182];[$JSON.$T$1];[.$B182];[$JSON.$U$1])" office:value-type="string" office:string-value="{&quot;id&quot;:&quot;2-49&quot;,&quot;name&quot;:&quot;籠城戦&quot;,&quot;displayName&quot;:&quot;籠城戦&quot;,&quot;kana&quot;:&quot;ろうじょうせん&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rarity&quot;:1,&quot;type&quot;:2,&quot;level&quot;:2,&quot;color&quot;:1,&quot;term&quot;:4,&quot;trait&quot;:0,&quot;power&quot;:null,&quot;legacy&quot;:1,&quot;anyNumCopies&quot;:false,&quot;orderTable&quot;:181,&quot;orderDeck&quot;:304}," calcext:value-type="string">
            <text:p>{"id":"2-49","name":"籠城戦","displayName":"籠城戦","kana":"ろうじょうせん","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rarity":1,"type":2,"level":2,"color":1,"term":4,"trait":0,"power":null,"legacy":1,"anyNumCopies":false,"orderTable":181,"orderDeck":304},</text:p>
          </table:table-cell>
          <table:table-cell table:number-columns-repeated="16356"/>
        </table:table-row>
        <table:table-row table:style-name="ro2">
          <table:table-cell table:style-name="ce11" office:value-type="float" office:value="182" calcext:value-type="float">
            <text:p>182</text:p>
          </table:table-cell>
          <table:table-cell table:style-name="ce11" office:value-type="float" office:value="340" calcext:value-type="float">
            <text:p>340</text:p>
          </table:table-cell>
          <table:table-cell table:style-name="ce21" office:value-type="string" calcext:value-type="string">
            <text:p>2-50</text:p>
          </table:table-cell>
          <table:table-cell table:style-name="ce21" office:value-type="float" office:value="50" calcext:value-type="float">
            <text:p>50</text:p>
          </table:table-cell>
          <table:table-cell table:style-name="ce11" office:value-type="string" calcext:value-type="string">
            <text:p>安宅船</text:p>
          </table:table-cell>
          <table:table-cell table:style-name="ce11" table:formula="of:=[.E183]" office:value-type="string" office:string-value="安宅船" calcext:value-type="string">
            <text:p>安宅船</text:p>
          </table:table-cell>
          <table:table-cell table:style-name="ce11" office:value-type="string" calcext:value-type="string">
            <text:p>あたけぶね</text:p>
          </table:table-cell>
          <table:table-cell table:style-name="ce11" office:value-type="string" calcext:value-type="string">
            <text:p>第２弾ブースターパック</text:p>
          </table:table-cell>
          <table:table-cell table:style-name="ce11" table:formula="of:=VLOOKUP([.H183];[$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8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3];[$種類番号.$A$1:$種類番号.$B$4];2;0)" office:value-type="float" office:value="2" calcext:value-type="float">
            <text:p>2</text:p>
          </table:table-cell>
          <table:table-cell table:style-name="ce11" office:value-type="string" calcext:value-type="string">
            <text:p>赤</text:p>
          </table:table-cell>
          <table:table-cell table:style-name="ce11" table:formula="of:=VLOOKUP([.N183];[$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83];[$特性番号.$A$1:$特性番号.$B$8];2;0);0)" office:value-type="float" office:value="0" calcext:value-type="float">
            <text:p>0</text:p>
          </table:table-cell>
          <table:table-cell table:style-name="ce11"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0.png</text:p>
          </table:table-cell>
          <table:table-cell table:style-name="ce11" table:formula="of:=CONCATENATE([$JSON.$A$1];[.$C183];[$JSON.$B$1];[.$E183];[$JSON.$C$1];[.F183];[$JSON.$D$1];[.$G183];[$JSON.$E$1];IF(ISNA([.$T183]);&quot;null&quot;;&quot;&quot;&quot;&quot;&amp;[.$T183]&amp;&quot;&quot;&quot;&quot;);[$JSON.$F$1];[.$V183];[$JSON.$G$1];IF(ISNA([.$X183]);&quot;null&quot;;&quot;&quot;&quot;&quot;&amp;[.$X183]&amp;&quot;&quot;&quot;&quot;);[$JSON.$H$1];[.$AA183];[$JSON.$I$1];[.$I183];[$JSON.$J$1];[.K183];[$JSON.$K$1];[.$M183];[$JSON.$L$1];[.$P183];[$JSON.$M$1];[.$O183];[$JSON.$N$1];[.$S183];[$JSON.$O$1];[.$U183];[$JSON.$P$1];IF(ISNA([.$W183]);&quot;null&quot;;[.$W183]);[$JSON.$Q$1];[.$Y183];[$JSON.$R$1];IF([.$Z183];&quot;true&quot;;&quot;false&quot;);[$JSON.$S$1];[.$A183];[$JSON.$T$1];[.$B183];[$JSON.$U$1])" office:value-type="string" office:string-value="{&quot;id&quot;:&quot;2-50&quot;,&quot;name&quot;:&quot;安宅船&quot;,&quot;displayName&quot;:&quot;安宅船&quot;,&quot;kana&quot;:&quot;あたけぶね&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rarity&quot;:1,&quot;type&quot;:2,&quot;level&quot;:5,&quot;color&quot;:1,&quot;term&quot;:0,&quot;trait&quot;:0,&quot;power&quot;:null,&quot;legacy&quot;:0,&quot;anyNumCopies&quot;:false,&quot;orderTable&quot;:182,&quot;orderDeck&quot;:340}," calcext:value-type="string">
            <text:p>{"id":"2-50","name":"安宅船","displayName":"安宅船","kana":"あたけぶね","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rarity":1,"type":2,"level":5,"color":1,"term":0,"trait":0,"power":null,"legacy":0,"anyNumCopies":false,"orderTable":182,"orderDeck":340},</text:p>
          </table:table-cell>
          <table:table-cell table:number-columns-repeated="16356"/>
        </table:table-row>
        <table:table-row table:style-name="ro2">
          <table:table-cell table:style-name="ce11" office:value-type="float" office:value="183" calcext:value-type="float">
            <text:p>183</text:p>
          </table:table-cell>
          <table:table-cell table:style-name="ce11" office:value-type="float" office:value="334" calcext:value-type="float">
            <text:p>334</text:p>
          </table:table-cell>
          <table:table-cell table:style-name="ce21" office:value-type="string" calcext:value-type="string">
            <text:p>2-51</text:p>
          </table:table-cell>
          <table:table-cell table:style-name="ce21" office:value-type="float" office:value="51" calcext:value-type="float">
            <text:p>51</text:p>
          </table:table-cell>
          <table:table-cell table:style-name="ce11" office:value-type="string" calcext:value-type="string">
            <text:p>リヴァイアサン</text:p>
          </table:table-cell>
          <table:table-cell table:style-name="ce11" table:formula="of:=[.E184]" office:value-type="string" office:string-value="リヴァイアサン" calcext:value-type="string">
            <text:p>リヴァイアサン</text:p>
          </table:table-cell>
          <table:table-cell table:style-name="ce11" office:value-type="string" calcext:value-type="string">
            <text:p>りゔぁいあさん</text:p>
          </table:table-cell>
          <table:table-cell table:style-name="ce11" office:value-type="string" calcext:value-type="string">
            <text:p>第２弾ブースターパック</text:p>
          </table:table-cell>
          <table:table-cell table:style-name="ce11" table:formula="of:=VLOOKUP([.H184];[$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8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4];[$種類番号.$A$1:$種類番号.$B$4];2;0)" office:value-type="float" office:value="2" calcext:value-type="float">
            <text:p>2</text:p>
          </table:table-cell>
          <table:table-cell table:style-name="ce11" office:value-type="string" calcext:value-type="string">
            <text:p>青</text:p>
          </table:table-cell>
          <table:table-cell table:style-name="ce11" table:formula="of:=VLOOKUP([.N184];[$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4];[$能力語番号.$A$1:$能力語番号.$B$11];2;0);0)" office:value-type="float" office:value="0" calcext:value-type="float">
            <text:p>0</text:p>
          </table:table-cell>
          <table:table-cell office:value-type="string" calcext:value-type="string">
            <text:p>思想</text:p>
          </table:table-cell>
          <table:table-cell table:style-name="ce11" table:formula="of:=IFERROR(VLOOKUP([.$T184];[$特性番号.$A$1:$特性番号.$B$8];2;0);0)" office:value-type="float" office:value="8" calcext:value-type="float">
            <text:p>8</text:p>
          </table:table-cell>
          <table:table-cell table:style-name="ce11" office:value-type="string" calcext:value-type="string">
            <text:p>相手がアタックしたとき、自分の戦場のイジンをすきなだけ起こして、ガーディアン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84];[$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1.png</text:p>
          </table:table-cell>
          <table:table-cell table:style-name="ce11" table:formula="of:=CONCATENATE([$JSON.$A$1];[.$C184];[$JSON.$B$1];[.$E184];[$JSON.$C$1];[.F184];[$JSON.$D$1];[.$G184];[$JSON.$E$1];IF(ISNA([.$T184]);&quot;null&quot;;&quot;&quot;&quot;&quot;&amp;[.$T184]&amp;&quot;&quot;&quot;&quot;);[$JSON.$F$1];[.$V184];[$JSON.$G$1];IF(ISNA([.$X184]);&quot;null&quot;;&quot;&quot;&quot;&quot;&amp;[.$X184]&amp;&quot;&quot;&quot;&quot;);[$JSON.$H$1];[.$AA184];[$JSON.$I$1];[.$I184];[$JSON.$J$1];[.K184];[$JSON.$K$1];[.$M184];[$JSON.$L$1];[.$P184];[$JSON.$M$1];[.$O184];[$JSON.$N$1];[.$S184];[$JSON.$O$1];[.$U184];[$JSON.$P$1];IF(ISNA([.$W184]);&quot;null&quot;;[.$W184]);[$JSON.$Q$1];[.$Y184];[$JSON.$R$1];IF([.$Z184];&quot;true&quot;;&quot;false&quot;);[$JSON.$S$1];[.$A184];[$JSON.$T$1];[.$B184];[$JSON.$U$1])" office:value-type="string" office:string-value="{&quot;id&quot;:&quot;2-51&quot;,&quot;name&quot;:&quot;リヴァイアサン&quot;,&quot;displayName&quot;:&quot;リヴァイアサン&quot;,&quot;kana&quot;:&quot;りゔぁいあさん&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rarity&quot;:1,&quot;type&quot;:2,&quot;level&quot;:4,&quot;color&quot;:2,&quot;term&quot;:0,&quot;trait&quot;:8,&quot;power&quot;:null,&quot;legacy&quot;:5,&quot;anyNumCopies&quot;:false,&quot;orderTable&quot;:183,&quot;orderDeck&quot;:334}," calcext:value-type="string">
            <text:p>{"id":"2-51","name":"リヴァイアサン","displayName":"リヴァイアサン","kana":"りゔぁいあさん","traitText":"思想","ruleText":"相手がアタックしたとき、自分の戦場のイジンをすきなだけ起こして、ガーディアンにする。","legacyText":"手札に戻す","imageUrl":"https://one-draw.jp/ijinden/cardlist/002/card/02_051.png","expansion":25,"rarity":1,"type":2,"level":4,"color":2,"term":0,"trait":8,"power":null,"legacy":5,"anyNumCopies":false,"orderTable":183,"orderDeck":334},</text:p>
          </table:table-cell>
          <table:table-cell table:number-columns-repeated="16356"/>
        </table:table-row>
        <table:table-row table:style-name="ro2">
          <table:table-cell table:style-name="ce11" office:value-type="float" office:value="184" calcext:value-type="float">
            <text:p>184</text:p>
          </table:table-cell>
          <table:table-cell table:style-name="ce11" office:value-type="float" office:value="349" calcext:value-type="float">
            <text:p>349</text:p>
          </table:table-cell>
          <table:table-cell table:style-name="ce21" office:value-type="string" calcext:value-type="string">
            <text:p>2-52</text:p>
          </table:table-cell>
          <table:table-cell table:style-name="ce21" office:value-type="float" office:value="52" calcext:value-type="float">
            <text:p>52</text:p>
          </table:table-cell>
          <table:table-cell table:style-name="ce11" office:value-type="string" calcext:value-type="string">
            <text:p>ガレオン船</text:p>
          </table:table-cell>
          <table:table-cell table:style-name="ce11" table:formula="of:=[.E185]" office:value-type="string" office:string-value="ガレオン船" calcext:value-type="string">
            <text:p>ガレオン船</text:p>
          </table:table-cell>
          <table:table-cell table:style-name="ce11" office:value-type="string" calcext:value-type="string">
            <text:p>がれおんせん</text:p>
          </table:table-cell>
          <table:table-cell table:style-name="ce11" office:value-type="string" calcext:value-type="string">
            <text:p>第２弾ブースターパック</text:p>
          </table:table-cell>
          <table:table-cell table:style-name="ce11" table:formula="of:=VLOOKUP([.H185];[$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8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5];[$種類番号.$A$1:$種類番号.$B$4];2;0)" office:value-type="float" office:value="2" calcext:value-type="float">
            <text:p>2</text:p>
          </table:table-cell>
          <table:table-cell table:style-name="ce11" office:value-type="string" calcext:value-type="string">
            <text:p>青</text:p>
          </table:table-cell>
          <table:table-cell table:style-name="ce11" table:formula="of:=VLOOKUP([.N185];[$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85];[$特性番号.$A$1:$特性番号.$B$8];2;0);0)" office:value-type="float" office:value="0" calcext:value-type="float">
            <text:p>0</text:p>
          </table:table-cell>
          <table:table-cell table:style-name="ce11"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2.png</text:p>
          </table:table-cell>
          <table:table-cell table:style-name="ce11" table:formula="of:=CONCATENATE([$JSON.$A$1];[.$C185];[$JSON.$B$1];[.$E185];[$JSON.$C$1];[.F185];[$JSON.$D$1];[.$G185];[$JSON.$E$1];IF(ISNA([.$T185]);&quot;null&quot;;&quot;&quot;&quot;&quot;&amp;[.$T185]&amp;&quot;&quot;&quot;&quot;);[$JSON.$F$1];[.$V185];[$JSON.$G$1];IF(ISNA([.$X185]);&quot;null&quot;;&quot;&quot;&quot;&quot;&amp;[.$X185]&amp;&quot;&quot;&quot;&quot;);[$JSON.$H$1];[.$AA185];[$JSON.$I$1];[.$I185];[$JSON.$J$1];[.K185];[$JSON.$K$1];[.$M185];[$JSON.$L$1];[.$P185];[$JSON.$M$1];[.$O185];[$JSON.$N$1];[.$S185];[$JSON.$O$1];[.$U185];[$JSON.$P$1];IF(ISNA([.$W185]);&quot;null&quot;;[.$W185]);[$JSON.$Q$1];[.$Y185];[$JSON.$R$1];IF([.$Z185];&quot;true&quot;;&quot;false&quot;);[$JSON.$S$1];[.$A185];[$JSON.$T$1];[.$B185];[$JSON.$U$1])" office:value-type="string" office:string-value="{&quot;id&quot;:&quot;2-52&quot;,&quot;name&quot;:&quot;ガレオン船&quot;,&quot;displayName&quot;:&quot;ガレオン船&quot;,&quot;kana&quot;:&quot;がれおんせん&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rarity&quot;:1,&quot;type&quot;:2,&quot;level&quot;:6,&quot;color&quot;:2,&quot;term&quot;:0,&quot;trait&quot;:0,&quot;power&quot;:null,&quot;legacy&quot;:0,&quot;anyNumCopies&quot;:false,&quot;orderTable&quot;:184,&quot;orderDeck&quot;:349}," calcext:value-type="string">
            <text:p>{"id":"2-52","name":"ガレオン船","displayName":"ガレオン船","kana":"がれおんせん","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rarity":1,"type":2,"level":6,"color":2,"term":0,"trait":0,"power":null,"legacy":0,"anyNumCopies":false,"orderTable":184,"orderDeck":349},</text:p>
          </table:table-cell>
          <table:table-cell table:number-columns-repeated="16356"/>
        </table:table-row>
        <table:table-row table:style-name="ro2">
          <table:table-cell table:style-name="ce11" office:value-type="float" office:value="185" calcext:value-type="float">
            <text:p>185</text:p>
          </table:table-cell>
          <table:table-cell table:style-name="ce11" office:value-type="float" office:value="310" calcext:value-type="float">
            <text:p>310</text:p>
          </table:table-cell>
          <table:table-cell table:style-name="ce21" office:value-type="string" calcext:value-type="string">
            <text:p>2-53</text:p>
          </table:table-cell>
          <table:table-cell table:style-name="ce21" office:value-type="float" office:value="53" calcext:value-type="float">
            <text:p>53</text:p>
          </table:table-cell>
          <table:table-cell table:style-name="ce11" office:value-type="string" calcext:value-type="string">
            <text:p>仁王</text:p>
          </table:table-cell>
          <table:table-cell table:style-name="ce11" table:formula="of:=[.E186]" office:value-type="string" office:string-value="仁王" calcext:value-type="string">
            <text:p>仁王</text:p>
          </table:table-cell>
          <table:table-cell table:style-name="ce11" office:value-type="string" calcext:value-type="string">
            <text:p>におう</text:p>
          </table:table-cell>
          <table:table-cell table:style-name="ce11" office:value-type="string" calcext:value-type="string">
            <text:p>第２弾ブースターパック</text:p>
          </table:table-cell>
          <table:table-cell table:style-name="ce11" table:formula="of:=VLOOKUP([.H186];[$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6];[$種類番号.$A$1:$種類番号.$B$4];2;0)" office:value-type="float" office:value="2" calcext:value-type="float">
            <text:p>2</text:p>
          </table:table-cell>
          <table:table-cell table:style-name="ce11" office:value-type="string" calcext:value-type="string">
            <text:p>緑</text:p>
          </table:table-cell>
          <table:table-cell table:style-name="ce11" table:formula="of:=VLOOKUP([.N186];[$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86];[$特性番号.$A$1:$特性番号.$B$8];2;0);0)" office:value-type="float" office:value="0" calcext:value-type="float">
            <text:p>0</text:p>
          </table:table-cell>
          <table:table-cell table:style-name="ce11" office:value-type="string" calcext:value-type="string">
            <text:p>能力によってこれを数える際、1つでなく2つと数える。¶イジンが自分の戦場に、ちょうど2体いる間、自分の戦場のイジンは「ウォッチャー」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8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3.png</text:p>
          </table:table-cell>
          <table:table-cell table:style-name="ce11" table:formula="of:=CONCATENATE([$JSON.$A$1];[.$C186];[$JSON.$B$1];[.$E186];[$JSON.$C$1];[.F186];[$JSON.$D$1];[.$G186];[$JSON.$E$1];IF(ISNA([.$T186]);&quot;null&quot;;&quot;&quot;&quot;&quot;&amp;[.$T186]&amp;&quot;&quot;&quot;&quot;);[$JSON.$F$1];[.$V186];[$JSON.$G$1];IF(ISNA([.$X186]);&quot;null&quot;;&quot;&quot;&quot;&quot;&amp;[.$X186]&amp;&quot;&quot;&quot;&quot;);[$JSON.$H$1];[.$AA186];[$JSON.$I$1];[.$I186];[$JSON.$J$1];[.K186];[$JSON.$K$1];[.$M186];[$JSON.$L$1];[.$P186];[$JSON.$M$1];[.$O186];[$JSON.$N$1];[.$S186];[$JSON.$O$1];[.$U186];[$JSON.$P$1];IF(ISNA([.$W186]);&quot;null&quot;;[.$W186]);[$JSON.$Q$1];[.$Y186];[$JSON.$R$1];IF([.$Z186];&quot;true&quot;;&quot;false&quot;);[$JSON.$S$1];[.$A186];[$JSON.$T$1];[.$B186];[$JSON.$U$1])" office:value-type="string" office:string-value="{&quot;id&quot;:&quot;2-53&quot;,&quot;name&quot;:&quot;仁王&quot;,&quot;displayName&quot;:&quot;仁王&quot;,&quot;kana&quot;:&quot;におう&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rarity&quot;:1,&quot;type&quot;:2,&quot;level&quot;:2,&quot;color&quot;:4,&quot;term&quot;:0,&quot;trait&quot;:0,&quot;power&quot;:null,&quot;legacy&quot;:1,&quot;anyNumCopies&quot;:false,&quot;orderTable&quot;:185,&quot;orderDeck&quot;:310}," calcext:value-type="string">
            <text:p>{"id":"2-53","name":"仁王","displayName":"仁王","kana":"におう","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rarity":1,"type":2,"level":2,"color":4,"term":0,"trait":0,"power":null,"legacy":1,"anyNumCopies":false,"orderTable":185,"orderDeck":310},</text:p>
          </table:table-cell>
          <table:table-cell table:number-columns-repeated="16356"/>
        </table:table-row>
        <table:table-row table:style-name="ro2">
          <table:table-cell table:style-name="ce11" office:value-type="float" office:value="186" calcext:value-type="float">
            <text:p>186</text:p>
          </table:table-cell>
          <table:table-cell table:style-name="ce11" office:value-type="float" office:value="355" calcext:value-type="float">
            <text:p>355</text:p>
          </table:table-cell>
          <table:table-cell table:style-name="ce21" office:value-type="string" calcext:value-type="string">
            <text:p>2-54</text:p>
          </table:table-cell>
          <table:table-cell table:style-name="ce21" office:value-type="float" office:value="54" calcext:value-type="float">
            <text:p>54</text:p>
          </table:table-cell>
          <table:table-cell table:style-name="ce11" office:value-type="string" calcext:value-type="string">
            <text:p>蒸気機関車</text:p>
          </table:table-cell>
          <table:table-cell table:style-name="ce11" table:formula="of:=[.E187]" office:value-type="string" office:string-value="蒸気機関車" calcext:value-type="string">
            <text:p>蒸気機関車</text:p>
          </table:table-cell>
          <table:table-cell table:style-name="ce11" office:value-type="string" calcext:value-type="string">
            <text:p>じょうききかんしゃ</text:p>
          </table:table-cell>
          <table:table-cell table:style-name="ce11" office:value-type="string" calcext:value-type="string">
            <text:p>第２弾ブースターパック</text:p>
          </table:table-cell>
          <table:table-cell table:style-name="ce11" table:formula="of:=VLOOKUP([.H187];[$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7];[$種類番号.$A$1:$種類番号.$B$4];2;0)" office:value-type="float" office:value="2" calcext:value-type="float">
            <text:p>2</text:p>
          </table:table-cell>
          <table:table-cell table:style-name="ce11" office:value-type="string" calcext:value-type="string">
            <text:p>緑</text:p>
          </table:table-cell>
          <table:table-cell table:style-name="ce11" table:formula="of:=VLOOKUP([.N187];[$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87];[$特性番号.$A$1:$特性番号.$B$8];2;0);0)" office:value-type="float" office:value="0" calcext:value-type="float">
            <text:p>0</text:p>
          </table:table-cell>
          <table:table-cell table:style-name="ce11"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8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4.png</text:p>
          </table:table-cell>
          <table:table-cell table:style-name="ce11" table:formula="of:=CONCATENATE([$JSON.$A$1];[.$C187];[$JSON.$B$1];[.$E187];[$JSON.$C$1];[.F187];[$JSON.$D$1];[.$G187];[$JSON.$E$1];IF(ISNA([.$T187]);&quot;null&quot;;&quot;&quot;&quot;&quot;&amp;[.$T187]&amp;&quot;&quot;&quot;&quot;);[$JSON.$F$1];[.$V187];[$JSON.$G$1];IF(ISNA([.$X187]);&quot;null&quot;;&quot;&quot;&quot;&quot;&amp;[.$X187]&amp;&quot;&quot;&quot;&quot;);[$JSON.$H$1];[.$AA187];[$JSON.$I$1];[.$I187];[$JSON.$J$1];[.K187];[$JSON.$K$1];[.$M187];[$JSON.$L$1];[.$P187];[$JSON.$M$1];[.$O187];[$JSON.$N$1];[.$S187];[$JSON.$O$1];[.$U187];[$JSON.$P$1];IF(ISNA([.$W187]);&quot;null&quot;;[.$W187]);[$JSON.$Q$1];[.$Y187];[$JSON.$R$1];IF([.$Z187];&quot;true&quot;;&quot;false&quot;);[$JSON.$S$1];[.$A187];[$JSON.$T$1];[.$B187];[$JSON.$U$1])" office:value-type="string" office:string-value="{&quot;id&quot;:&quot;2-54&quot;,&quot;name&quot;:&quot;蒸気機関車&quot;,&quot;displayName&quot;:&quot;蒸気機関車&quot;,&quot;kana&quot;:&quot;じょうききかんしゃ&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rarity&quot;:1,&quot;type&quot;:2,&quot;level&quot;:7,&quot;color&quot;:4,&quot;term&quot;:0,&quot;trait&quot;:0,&quot;power&quot;:null,&quot;legacy&quot;:0,&quot;anyNumCopies&quot;:false,&quot;orderTable&quot;:186,&quot;orderDeck&quot;:355}," calcext:value-type="string">
            <text:p>{"id":"2-54","name":"蒸気機関車","displayName":"蒸気機関車","kana":"じょうききかんしゃ","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rarity":1,"type":2,"level":7,"color":4,"term":0,"trait":0,"power":null,"legacy":0,"anyNumCopies":false,"orderTable":186,"orderDeck":355},</text:p>
          </table:table-cell>
          <table:table-cell table:number-columns-repeated="16356"/>
        </table:table-row>
        <table:table-row table:style-name="ro2">
          <table:table-cell table:style-name="ce11" office:value-type="float" office:value="187" calcext:value-type="float">
            <text:p>187</text:p>
          </table:table-cell>
          <table:table-cell table:style-name="ce11" office:value-type="float" office:value="313" calcext:value-type="float">
            <text:p>313</text:p>
          </table:table-cell>
          <table:table-cell table:style-name="ce21" office:value-type="string" calcext:value-type="string">
            <text:p>2-55</text:p>
          </table:table-cell>
          <table:table-cell table:style-name="ce21" office:value-type="float" office:value="55" calcext:value-type="float">
            <text:p>55</text:p>
          </table:table-cell>
          <table:table-cell table:style-name="ce11" office:value-type="string" calcext:value-type="string">
            <text:p>凱旋門</text:p>
          </table:table-cell>
          <table:table-cell table:style-name="ce11" table:formula="of:=[.E188]" office:value-type="string" office:string-value="凱旋門" calcext:value-type="string">
            <text:p>凱旋門</text:p>
          </table:table-cell>
          <table:table-cell table:style-name="ce11" office:value-type="string" calcext:value-type="string">
            <text:p>がいせんもん</text:p>
          </table:table-cell>
          <table:table-cell table:style-name="ce11" office:value-type="string" calcext:value-type="string">
            <text:p>第２弾ブースターパック</text:p>
          </table:table-cell>
          <table:table-cell table:style-name="ce11" table:formula="of:=VLOOKUP([.H188];[$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8];[$種類番号.$A$1:$種類番号.$B$4];2;0)" office:value-type="float" office:value="2" calcext:value-type="float">
            <text:p>2</text:p>
          </table:table-cell>
          <table:table-cell table:style-name="ce11" office:value-type="string" calcext:value-type="string">
            <text:p>黄</text:p>
          </table:table-cell>
          <table:table-cell table:style-name="ce11" table:formula="of:=VLOOKUP([.N188];[$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88];[$特性番号.$A$1:$特性番号.$B$8];2;0);0)" office:value-type="float" office:value="0" calcext:value-type="float">
            <text:p>0</text:p>
          </table:table-cell>
          <table:table-cell table:style-name="ce11"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8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5.png</text:p>
          </table:table-cell>
          <table:table-cell table:style-name="ce11" table:formula="of:=CONCATENATE([$JSON.$A$1];[.$C188];[$JSON.$B$1];[.$E188];[$JSON.$C$1];[.F188];[$JSON.$D$1];[.$G188];[$JSON.$E$1];IF(ISNA([.$T188]);&quot;null&quot;;&quot;&quot;&quot;&quot;&amp;[.$T188]&amp;&quot;&quot;&quot;&quot;);[$JSON.$F$1];[.$V188];[$JSON.$G$1];IF(ISNA([.$X188]);&quot;null&quot;;&quot;&quot;&quot;&quot;&amp;[.$X188]&amp;&quot;&quot;&quot;&quot;);[$JSON.$H$1];[.$AA188];[$JSON.$I$1];[.$I188];[$JSON.$J$1];[.K188];[$JSON.$K$1];[.$M188];[$JSON.$L$1];[.$P188];[$JSON.$M$1];[.$O188];[$JSON.$N$1];[.$S188];[$JSON.$O$1];[.$U188];[$JSON.$P$1];IF(ISNA([.$W188]);&quot;null&quot;;[.$W188]);[$JSON.$Q$1];[.$Y188];[$JSON.$R$1];IF([.$Z188];&quot;true&quot;;&quot;false&quot;);[$JSON.$S$1];[.$A188];[$JSON.$T$1];[.$B188];[$JSON.$U$1])" office:value-type="string" office:string-value="{&quot;id&quot;:&quot;2-55&quot;,&quot;name&quot;:&quot;凱旋門&quot;,&quot;displayName&quot;:&quot;凱旋門&quot;,&quot;kana&quot;:&quot;がいせんもん&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rarity&quot;:1,&quot;type&quot;:2,&quot;level&quot;:2,&quot;color&quot;:8,&quot;term&quot;:0,&quot;trait&quot;:0,&quot;power&quot;:null,&quot;legacy&quot;:7,&quot;anyNumCopies&quot;:false,&quot;orderTable&quot;:187,&quot;orderDeck&quot;:313}," calcext:value-type="string">
            <text:p>{"id":"2-55","name":"凱旋門","displayName":"凱旋門","kana":"がいせんもん","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rarity":1,"type":2,"level":2,"color":8,"term":0,"trait":0,"power":null,"legacy":7,"anyNumCopies":false,"orderTable":187,"orderDeck":313},</text:p>
          </table:table-cell>
          <table:table-cell table:number-columns-repeated="16356"/>
        </table:table-row>
        <table:table-row table:style-name="ro2">
          <table:table-cell table:style-name="ce11" office:value-type="float" office:value="188" calcext:value-type="float">
            <text:p>188</text:p>
          </table:table-cell>
          <table:table-cell table:style-name="ce11" office:value-type="float" office:value="326" calcext:value-type="float">
            <text:p>326</text:p>
          </table:table-cell>
          <table:table-cell table:style-name="ce21" office:value-type="string" calcext:value-type="string">
            <text:p>2-56</text:p>
          </table:table-cell>
          <table:table-cell table:style-name="ce21" office:value-type="float" office:value="56" calcext:value-type="float">
            <text:p>56</text:p>
          </table:table-cell>
          <table:table-cell table:style-name="ce11" office:value-type="string" calcext:value-type="string">
            <text:p>三層の舎利殿</text:p>
          </table:table-cell>
          <table:table-cell table:style-name="ce11" table:formula="of:=[.E189]" office:value-type="string" office:string-value="三層の舎利殿" calcext:value-type="string">
            <text:p>三層の舎利殿</text:p>
          </table:table-cell>
          <table:table-cell table:style-name="ce11" office:value-type="string" calcext:value-type="string">
            <text:p>さんそうのしゃりでん</text:p>
          </table:table-cell>
          <table:table-cell table:style-name="ce11" office:value-type="string" calcext:value-type="string">
            <text:p>第２弾ブースターパック</text:p>
          </table:table-cell>
          <table:table-cell table:style-name="ce11" table:formula="of:=VLOOKUP([.H189];[$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189];[$種類番号.$A$1:$種類番号.$B$4];2;0)" office:value-type="float" office:value="2" calcext:value-type="float">
            <text:p>2</text:p>
          </table:table-cell>
          <table:table-cell table:style-name="ce11" office:value-type="string" calcext:value-type="string">
            <text:p>黄</text:p>
          </table:table-cell>
          <table:table-cell table:style-name="ce11" table:formula="of:=VLOOKUP([.N18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18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89];[$特性番号.$A$1:$特性番号.$B$8];2;0);0)" office:value-type="float" office:value="0" calcext:value-type="float">
            <text:p>0</text:p>
          </table:table-cell>
          <table:table-cell table:style-name="ce11"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189];[$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6.png</text:p>
          </table:table-cell>
          <table:table-cell table:style-name="ce11" table:formula="of:=CONCATENATE([$JSON.$A$1];[.$C189];[$JSON.$B$1];[.$E189];[$JSON.$C$1];[.F189];[$JSON.$D$1];[.$G189];[$JSON.$E$1];IF(ISNA([.$T189]);&quot;null&quot;;&quot;&quot;&quot;&quot;&amp;[.$T189]&amp;&quot;&quot;&quot;&quot;);[$JSON.$F$1];[.$V189];[$JSON.$G$1];IF(ISNA([.$X189]);&quot;null&quot;;&quot;&quot;&quot;&quot;&amp;[.$X189]&amp;&quot;&quot;&quot;&quot;);[$JSON.$H$1];[.$AA189];[$JSON.$I$1];[.$I189];[$JSON.$J$1];[.K189];[$JSON.$K$1];[.$M189];[$JSON.$L$1];[.$P189];[$JSON.$M$1];[.$O189];[$JSON.$N$1];[.$S189];[$JSON.$O$1];[.$U189];[$JSON.$P$1];IF(ISNA([.$W189]);&quot;null&quot;;[.$W189]);[$JSON.$Q$1];[.$Y189];[$JSON.$R$1];IF([.$Z189];&quot;true&quot;;&quot;false&quot;);[$JSON.$S$1];[.$A189];[$JSON.$T$1];[.$B189];[$JSON.$U$1])" office:value-type="string" office:string-value="{&quot;id&quot;:&quot;2-56&quot;,&quot;name&quot;:&quot;三層の舎利殿&quot;,&quot;displayName&quot;:&quot;三層の舎利殿&quot;,&quot;kana&quot;:&quot;さんそうのしゃりでん&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rarity&quot;:1,&quot;type&quot;:2,&quot;level&quot;:3,&quot;color&quot;:8,&quot;term&quot;:0,&quot;trait&quot;:0,&quot;power&quot;:null,&quot;legacy&quot;:7,&quot;anyNumCopies&quot;:false,&quot;orderTable&quot;:188,&quot;orderDeck&quot;:326}," calcext:value-type="string">
            <text:p>{"id":"2-56","name":"三層の舎利殿","displayName":"三層の舎利殿","kana":"さんそうのしゃりでん","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rarity":1,"type":2,"level":3,"color":8,"term":0,"trait":0,"power":null,"legacy":7,"anyNumCopies":false,"orderTable":188,"orderDeck":326},</text:p>
          </table:table-cell>
          <table:table-cell table:number-columns-repeated="16356"/>
        </table:table-row>
        <table:table-row table:style-name="ro2">
          <table:table-cell table:style-name="ce11" office:value-type="float" office:value="189" calcext:value-type="float">
            <text:p>189</text:p>
          </table:table-cell>
          <table:table-cell table:style-name="ce11" office:value-type="float" office:value="426" calcext:value-type="float">
            <text:p>426</text:p>
          </table:table-cell>
          <table:table-cell table:style-name="ce21" office:value-type="string" calcext:value-type="string">
            <text:p>2-57</text:p>
          </table:table-cell>
          <table:table-cell table:style-name="ce21" office:value-type="float" office:value="57" calcext:value-type="float">
            <text:p>57</text:p>
          </table:table-cell>
          <table:table-cell table:style-name="ce11" office:value-type="string" calcext:value-type="string">
            <text:p>スペクター</text:p>
          </table:table-cell>
          <table:table-cell table:style-name="ce11" table:formula="of:=[.E190]" office:value-type="string" office:string-value="スペクター" calcext:value-type="string">
            <text:p>スペクター</text:p>
          </table:table-cell>
          <table:table-cell table:style-name="ce11" office:value-type="string" calcext:value-type="string">
            <text:p>すぺくたー</text:p>
          </table:table-cell>
          <table:table-cell table:style-name="ce11" office:value-type="string" calcext:value-type="string">
            <text:p>第２弾ブースターパック</text:p>
          </table:table-cell>
          <table:table-cell table:style-name="ce11" table:formula="of:=VLOOKUP([.H190];[$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90];[$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0];[$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0];[$色番号.$A$1:$色番号.$B$10];2;0)" office:value-type="float" office:value="1" calcext:value-type="float">
            <text:p>1</text:p>
          </table:table-cell>
          <table:table-cell table:style-name="ce11" office:value-type="float" office:value="7" calcext:value-type="float">
            <text:p>7</text:p>
          </table:table-cell>
          <table:table-cell table:style-name="ce11" office:value-type="float" office:value="1" calcext:value-type="float">
            <text:p>1</text:p>
          </table:table-cell>
          <table:table-cell table:style-name="ce11" office:value-type="string" calcext:value-type="string">
            <text:p>黄魔導</text:p>
          </table:table-cell>
          <table:table-cell table:style-name="ce11" table:formula="of:=IFERROR(VLOOKUP([.$R190];[$能力語番号.$A$1:$能力語番号.$B$11];2;0);0)" office:value-type="float" office:value="272" calcext:value-type="float">
            <text:p>272</text:p>
          </table:table-cell>
          <table:table-cell table:formula="of:=NA()" office:value-type="string" office:string-value="" calcext:value-type="error">
            <text:p>#N/A</text:p>
          </table:table-cell>
          <table:table-cell table:style-name="ce11" table:formula="of:=IFERROR(VLOOKUP([.$T190];[$特性番号.$A$1:$特性番号.$B$8];2;0);0)" office:value-type="float" office:value="0" calcext:value-type="float">
            <text:p>0</text:p>
          </table:table-cell>
          <table:table-cell table:style-name="ce11"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9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7.png</text:p>
          </table:table-cell>
          <table:table-cell table:style-name="ce11" table:formula="of:=CONCATENATE([$JSON.$A$1];[.$C190];[$JSON.$B$1];[.$E190];[$JSON.$C$1];[.F190];[$JSON.$D$1];[.$G190];[$JSON.$E$1];IF(ISNA([.$T190]);&quot;null&quot;;&quot;&quot;&quot;&quot;&amp;[.$T190]&amp;&quot;&quot;&quot;&quot;);[$JSON.$F$1];[.$V190];[$JSON.$G$1];IF(ISNA([.$X190]);&quot;null&quot;;&quot;&quot;&quot;&quot;&amp;[.$X190]&amp;&quot;&quot;&quot;&quot;);[$JSON.$H$1];[.$AA190];[$JSON.$I$1];[.$I190];[$JSON.$J$1];[.K190];[$JSON.$K$1];[.$M190];[$JSON.$L$1];[.$P190];[$JSON.$M$1];[.$O190];[$JSON.$N$1];[.$S190];[$JSON.$O$1];[.$U190];[$JSON.$P$1];IF(ISNA([.$W190]);&quot;null&quot;;[.$W190]);[$JSON.$Q$1];[.$Y190];[$JSON.$R$1];IF([.$Z190];&quot;true&quot;;&quot;false&quot;);[$JSON.$S$1];[.$A190];[$JSON.$T$1];[.$B190];[$JSON.$U$1])" office:value-type="string" office:string-value="{&quot;id&quot;:&quot;2-57&quot;,&quot;name&quot;:&quot;スペクター&quot;,&quot;displayName&quot;:&quot;スペクター&quot;,&quot;kana&quot;:&quot;すぺくた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rarity&quot;:1,&quot;type&quot;:3,&quot;level&quot;:7,&quot;color&quot;:1,&quot;term&quot;:272,&quot;trait&quot;:0,&quot;power&quot;:null,&quot;legacy&quot;:0,&quot;anyNumCopies&quot;:false,&quot;orderTable&quot;:189,&quot;orderDeck&quot;:426}," calcext:value-type="string">
            <text:p>{"id":"2-57","name":"スペクター","displayName":"スペクター","kana":"すぺくた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rarity":1,"type":3,"level":7,"color":1,"term":272,"trait":0,"power":null,"legacy":0,"anyNumCopies":false,"orderTable":189,"orderDeck":426},</text:p>
          </table:table-cell>
          <table:table-cell table:number-columns-repeated="16356"/>
        </table:table-row>
        <table:table-row table:style-name="ro2">
          <table:table-cell table:style-name="ce11" office:value-type="float" office:value="190" calcext:value-type="float">
            <text:p>190</text:p>
          </table:table-cell>
          <table:table-cell table:style-name="ce11" office:value-type="float" office:value="371" calcext:value-type="float">
            <text:p>371</text:p>
          </table:table-cell>
          <table:table-cell table:style-name="ce21" office:value-type="string" calcext:value-type="string">
            <text:p>2-58</text:p>
          </table:table-cell>
          <table:table-cell table:style-name="ce21" office:value-type="float" office:value="58" calcext:value-type="float">
            <text:p>58</text:p>
          </table:table-cell>
          <table:table-cell table:style-name="ce11" office:value-type="string" calcext:value-type="string">
            <text:p>クイック</text:p>
          </table:table-cell>
          <table:table-cell table:style-name="ce11" table:formula="of:=[.E191]" office:value-type="string" office:string-value="クイック" calcext:value-type="string">
            <text:p>クイック</text:p>
          </table:table-cell>
          <table:table-cell table:style-name="ce11" office:value-type="string" calcext:value-type="string">
            <text:p>くいっく</text:p>
          </table:table-cell>
          <table:table-cell table:style-name="ce11" office:value-type="string" calcext:value-type="string">
            <text:p>第２弾ブースターパック</text:p>
          </table:table-cell>
          <table:table-cell table:style-name="ce11" table:formula="of:=VLOOKUP([.H191];[$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9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1];[$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1];[$色番号.$A$1:$色番号.$B$10];2;0)" office:value-type="float" office:value="1" calcext:value-type="float">
            <text:p>1</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91];[$特性番号.$A$1:$特性番号.$B$8];2;0);0)" office:value-type="float" office:value="0" calcext:value-type="float">
            <text:p>0</text:p>
          </table:table-cell>
          <table:table-cell table:style-name="ce11" office:value-type="string" calcext:value-type="string">
            <text:p>自分の戦場のレベル5以下のイジン1体を指定して発動できる。このターンの間、そのイジンは「即応」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19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8.png</text:p>
          </table:table-cell>
          <table:table-cell table:style-name="ce11" table:formula="of:=CONCATENATE([$JSON.$A$1];[.$C191];[$JSON.$B$1];[.$E191];[$JSON.$C$1];[.F191];[$JSON.$D$1];[.$G191];[$JSON.$E$1];IF(ISNA([.$T191]);&quot;null&quot;;&quot;&quot;&quot;&quot;&amp;[.$T191]&amp;&quot;&quot;&quot;&quot;);[$JSON.$F$1];[.$V191];[$JSON.$G$1];IF(ISNA([.$X191]);&quot;null&quot;;&quot;&quot;&quot;&quot;&amp;[.$X191]&amp;&quot;&quot;&quot;&quot;);[$JSON.$H$1];[.$AA191];[$JSON.$I$1];[.$I191];[$JSON.$J$1];[.K191];[$JSON.$K$1];[.$M191];[$JSON.$L$1];[.$P191];[$JSON.$M$1];[.$O191];[$JSON.$N$1];[.$S191];[$JSON.$O$1];[.$U191];[$JSON.$P$1];IF(ISNA([.$W191]);&quot;null&quot;;[.$W191]);[$JSON.$Q$1];[.$Y191];[$JSON.$R$1];IF([.$Z191];&quot;true&quot;;&quot;false&quot;);[$JSON.$S$1];[.$A191];[$JSON.$T$1];[.$B191];[$JSON.$U$1])" office:value-type="string" office:string-value="{&quot;id&quot;:&quot;2-58&quot;,&quot;name&quot;:&quot;クイック&quot;,&quot;displayName&quot;:&quot;クイック&quot;,&quot;kana&quot;:&quot;くいっく&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rarity&quot;:1,&quot;type&quot;:3,&quot;level&quot;:2,&quot;color&quot;:1,&quot;term&quot;:0,&quot;trait&quot;:0,&quot;power&quot;:null,&quot;legacy&quot;:0,&quot;anyNumCopies&quot;:false,&quot;orderTable&quot;:190,&quot;orderDeck&quot;:371}," calcext:value-type="string">
            <text:p>{"id":"2-58","name":"クイック","displayName":"クイック","kana":"くいっく","traitText":null,"ruleText":"自分の戦場のレベル5以下のイジン1体を指定して発動できる。このターンの間、そのイジンは「即応」を得る。","legacyText":null,"imageUrl":"https://one-draw.jp/ijinden/cardlist/002/card/02_058.png","expansion":25,"rarity":1,"type":3,"level":2,"color":1,"term":0,"trait":0,"power":null,"legacy":0,"anyNumCopies":false,"orderTable":190,"orderDeck":371},</text:p>
          </table:table-cell>
          <table:table-cell table:number-columns-repeated="16356"/>
        </table:table-row>
        <table:table-row table:style-name="ro2">
          <table:table-cell table:style-name="ce11" office:value-type="float" office:value="191" calcext:value-type="float">
            <text:p>191</text:p>
          </table:table-cell>
          <table:table-cell table:style-name="ce11" office:value-type="float" office:value="386" calcext:value-type="float">
            <text:p>386</text:p>
          </table:table-cell>
          <table:table-cell table:style-name="ce21" office:value-type="string" calcext:value-type="string">
            <text:p>2-59</text:p>
          </table:table-cell>
          <table:table-cell table:style-name="ce21" office:value-type="float" office:value="59" calcext:value-type="float">
            <text:p>59</text:p>
          </table:table-cell>
          <table:table-cell table:style-name="ce11" office:value-type="string" calcext:value-type="string">
            <text:p>サモン</text:p>
          </table:table-cell>
          <table:table-cell table:style-name="ce11" table:formula="of:=[.E192]" office:value-type="string" office:string-value="サモン" calcext:value-type="string">
            <text:p>サモン</text:p>
          </table:table-cell>
          <table:table-cell table:style-name="ce11" office:value-type="string" calcext:value-type="string">
            <text:p>さもん</text:p>
          </table:table-cell>
          <table:table-cell table:style-name="ce11" office:value-type="string" calcext:value-type="string">
            <text:p>第２弾ブースターパック</text:p>
          </table:table-cell>
          <table:table-cell table:style-name="ce11" table:formula="of:=VLOOKUP([.H192];[$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9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2];[$種類番号.$A$1:$種類番号.$B$4];2;0)" office:value-type="float" office:value="3" calcext:value-type="float">
            <text:p>3</text:p>
          </table:table-cell>
          <table:table-cell table:style-name="ce11" office:value-type="string" calcext:value-type="string">
            <text:p>赤</text:p>
          </table:table-cell>
          <table:table-cell table:style-name="ce11" table:formula="of:=VLOOKUP([.N192];[$色番号.$A$1:$色番号.$B$10];2;0)"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92];[$特性番号.$A$1:$特性番号.$B$8];2;0);0)" office:value-type="float" office:value="0" calcext:value-type="float">
            <text:p>0</text:p>
          </table:table-cell>
          <table:table-cell table:style-name="ce11" office:value-type="string" calcext:value-type="string">
            <text:p>イジン召喚権+1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59.png</text:p>
          </table:table-cell>
          <table:table-cell table:style-name="ce11" table:formula="of:=CONCATENATE([$JSON.$A$1];[.$C192];[$JSON.$B$1];[.$E192];[$JSON.$C$1];[.F192];[$JSON.$D$1];[.$G192];[$JSON.$E$1];IF(ISNA([.$T192]);&quot;null&quot;;&quot;&quot;&quot;&quot;&amp;[.$T192]&amp;&quot;&quot;&quot;&quot;);[$JSON.$F$1];[.$V192];[$JSON.$G$1];IF(ISNA([.$X192]);&quot;null&quot;;&quot;&quot;&quot;&quot;&amp;[.$X192]&amp;&quot;&quot;&quot;&quot;);[$JSON.$H$1];[.$AA192];[$JSON.$I$1];[.$I192];[$JSON.$J$1];[.K192];[$JSON.$K$1];[.$M192];[$JSON.$L$1];[.$P192];[$JSON.$M$1];[.$O192];[$JSON.$N$1];[.$S192];[$JSON.$O$1];[.$U192];[$JSON.$P$1];IF(ISNA([.$W192]);&quot;null&quot;;[.$W192]);[$JSON.$Q$1];[.$Y192];[$JSON.$R$1];IF([.$Z192];&quot;true&quot;;&quot;false&quot;);[$JSON.$S$1];[.$A192];[$JSON.$T$1];[.$B192];[$JSON.$U$1])" office:value-type="string" office:string-value="{&quot;id&quot;:&quot;2-59&quot;,&quot;name&quot;:&quot;サモン&quot;,&quot;displayName&quot;:&quot;サモン&quot;,&quot;kana&quot;:&quot;さもん&quot;,&quot;traitText&quot;:null,&quot;ruleText&quot;:&quot;イジン召喚権+1する。&quot;,&quot;legacyText&quot;:&quot;手札に戻す&quot;,&quot;imageUrl&quot;:&quot;https://one-draw.jp/ijinden/cardlist/002/card/02_059.png&quot;,&quot;expansion&quot;:25,&quot;rarity&quot;:1,&quot;type&quot;:3,&quot;level&quot;:3,&quot;color&quot;:1,&quot;term&quot;:0,&quot;trait&quot;:0,&quot;power&quot;:null,&quot;legacy&quot;:5,&quot;anyNumCopies&quot;:false,&quot;orderTable&quot;:191,&quot;orderDeck&quot;:386}," calcext:value-type="string">
            <text:p>{"id":"2-59","name":"サモン","displayName":"サモン","kana":"さもん","traitText":null,"ruleText":"イジン召喚権+1する。","legacyText":"手札に戻す","imageUrl":"https://one-draw.jp/ijinden/cardlist/002/card/02_059.png","expansion":25,"rarity":1,"type":3,"level":3,"color":1,"term":0,"trait":0,"power":null,"legacy":5,"anyNumCopies":false,"orderTable":191,"orderDeck":386},</text:p>
          </table:table-cell>
          <table:table-cell table:number-columns-repeated="16356"/>
        </table:table-row>
        <table:table-row table:style-name="ro2">
          <table:table-cell table:style-name="ce11" office:value-type="float" office:value="192" calcext:value-type="float">
            <text:p>192</text:p>
          </table:table-cell>
          <table:table-cell table:style-name="ce11" office:value-type="float" office:value="374" calcext:value-type="float">
            <text:p>374</text:p>
          </table:table-cell>
          <table:table-cell table:style-name="ce21" office:value-type="string" calcext:value-type="string">
            <text:p>2-60</text:p>
          </table:table-cell>
          <table:table-cell table:style-name="ce21" office:value-type="float" office:value="60" calcext:value-type="float">
            <text:p>60</text:p>
          </table:table-cell>
          <table:table-cell table:style-name="ce11" office:value-type="string" calcext:value-type="string">
            <text:p>フェイス</text:p>
          </table:table-cell>
          <table:table-cell table:style-name="ce11" table:formula="of:=[.E193]" office:value-type="string" office:string-value="フェイス" calcext:value-type="string">
            <text:p>フェイス</text:p>
          </table:table-cell>
          <table:table-cell table:style-name="ce11" office:value-type="string" calcext:value-type="string">
            <text:p>ふぇいす</text:p>
          </table:table-cell>
          <table:table-cell table:style-name="ce11" office:value-type="string" calcext:value-type="string">
            <text:p>第２弾ブースターパック</text:p>
          </table:table-cell>
          <table:table-cell table:style-name="ce11" table:formula="of:=VLOOKUP([.H193];[$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9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3];[$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3];[$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93];[$特性番号.$A$1:$特性番号.$B$8];2;0);0)" office:value-type="float" office:value="0" calcext:value-type="float">
            <text:p>0</text:p>
          </table:table-cell>
          <table:table-cell table:style-name="ce11" office:value-type="string" calcext:value-type="string">
            <text:p>自分の山札の上から1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0.png</text:p>
          </table:table-cell>
          <table:table-cell table:style-name="ce11" table:formula="of:=CONCATENATE([$JSON.$A$1];[.$C193];[$JSON.$B$1];[.$E193];[$JSON.$C$1];[.F193];[$JSON.$D$1];[.$G193];[$JSON.$E$1];IF(ISNA([.$T193]);&quot;null&quot;;&quot;&quot;&quot;&quot;&amp;[.$T193]&amp;&quot;&quot;&quot;&quot;);[$JSON.$F$1];[.$V193];[$JSON.$G$1];IF(ISNA([.$X193]);&quot;null&quot;;&quot;&quot;&quot;&quot;&amp;[.$X193]&amp;&quot;&quot;&quot;&quot;);[$JSON.$H$1];[.$AA193];[$JSON.$I$1];[.$I193];[$JSON.$J$1];[.K193];[$JSON.$K$1];[.$M193];[$JSON.$L$1];[.$P193];[$JSON.$M$1];[.$O193];[$JSON.$N$1];[.$S193];[$JSON.$O$1];[.$U193];[$JSON.$P$1];IF(ISNA([.$W193]);&quot;null&quot;;[.$W193]);[$JSON.$Q$1];[.$Y193];[$JSON.$R$1];IF([.$Z193];&quot;true&quot;;&quot;false&quot;);[$JSON.$S$1];[.$A193];[$JSON.$T$1];[.$B193];[$JSON.$U$1])" office:value-type="string" office:string-value="{&quot;id&quot;:&quot;2-60&quot;,&quot;name&quot;:&quot;フェイス&quot;,&quot;displayName&quot;:&quot;フェイス&quot;,&quot;kana&quot;:&quot;ふぇいす&quot;,&quot;traitText&quot;:null,&quot;ruleText&quot;:&quot;自分の山札の上から1枚をガーディアンにして戦場に置く。&quot;,&quot;legacyText&quot;:&quot;手札に戻す&quot;,&quot;imageUrl&quot;:&quot;https://one-draw.jp/ijinden/cardlist/002/card/02_060.png&quot;,&quot;expansion&quot;:25,&quot;rarity&quot;:1,&quot;type&quot;:3,&quot;level&quot;:2,&quot;color&quot;:2,&quot;term&quot;:0,&quot;trait&quot;:0,&quot;power&quot;:null,&quot;legacy&quot;:5,&quot;anyNumCopies&quot;:false,&quot;orderTable&quot;:192,&quot;orderDeck&quot;:374}," calcext:value-type="string">
            <text:p>{"id":"2-60","name":"フェイス","displayName":"フェイス","kana":"ふぇいす","traitText":null,"ruleText":"自分の山札の上から1枚をガーディアンにして戦場に置く。","legacyText":"手札に戻す","imageUrl":"https://one-draw.jp/ijinden/cardlist/002/card/02_060.png","expansion":25,"rarity":1,"type":3,"level":2,"color":2,"term":0,"trait":0,"power":null,"legacy":5,"anyNumCopies":false,"orderTable":192,"orderDeck":374},</text:p>
          </table:table-cell>
          <table:table-cell table:number-columns-repeated="16356"/>
        </table:table-row>
        <table:table-row table:style-name="ro2">
          <table:table-cell table:style-name="ce11" office:value-type="float" office:value="193" calcext:value-type="float">
            <text:p>193</text:p>
          </table:table-cell>
          <table:table-cell table:style-name="ce11" office:value-type="float" office:value="375" calcext:value-type="float">
            <text:p>375</text:p>
          </table:table-cell>
          <table:table-cell table:style-name="ce21" office:value-type="string" calcext:value-type="string">
            <text:p>2-61</text:p>
          </table:table-cell>
          <table:table-cell table:style-name="ce21" office:value-type="float" office:value="61" calcext:value-type="float">
            <text:p>61</text:p>
          </table:table-cell>
          <table:table-cell table:style-name="ce11" office:value-type="string" calcext:value-type="string">
            <text:p>リドロー</text:p>
          </table:table-cell>
          <table:table-cell table:style-name="ce11" table:formula="of:=[.E194]" office:value-type="string" office:string-value="リドロー" calcext:value-type="string">
            <text:p>リドロー</text:p>
          </table:table-cell>
          <table:table-cell table:style-name="ce11" office:value-type="string" calcext:value-type="string">
            <text:p>りどろー</text:p>
          </table:table-cell>
          <table:table-cell table:style-name="ce11" office:value-type="string" calcext:value-type="string">
            <text:p>第２弾ブースターパック</text:p>
          </table:table-cell>
          <table:table-cell table:style-name="ce11" table:formula="of:=VLOOKUP([.H194];[$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4];[$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4];[$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94];[$特性番号.$A$1:$特性番号.$B$8];2;0);0)" office:value-type="float" office:value="0" calcext:value-type="float">
            <text:p>0</text:p>
          </table:table-cell>
          <table:table-cell table:style-name="ce11" office:value-type="string" calcext:value-type="string">
            <text:p>2ドローして、自分の手札1枚を墓地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1.png</text:p>
          </table:table-cell>
          <table:table-cell table:style-name="ce11" table:formula="of:=CONCATENATE([$JSON.$A$1];[.$C194];[$JSON.$B$1];[.$E194];[$JSON.$C$1];[.F194];[$JSON.$D$1];[.$G194];[$JSON.$E$1];IF(ISNA([.$T194]);&quot;null&quot;;&quot;&quot;&quot;&quot;&amp;[.$T194]&amp;&quot;&quot;&quot;&quot;);[$JSON.$F$1];[.$V194];[$JSON.$G$1];IF(ISNA([.$X194]);&quot;null&quot;;&quot;&quot;&quot;&quot;&amp;[.$X194]&amp;&quot;&quot;&quot;&quot;);[$JSON.$H$1];[.$AA194];[$JSON.$I$1];[.$I194];[$JSON.$J$1];[.K194];[$JSON.$K$1];[.$M194];[$JSON.$L$1];[.$P194];[$JSON.$M$1];[.$O194];[$JSON.$N$1];[.$S194];[$JSON.$O$1];[.$U194];[$JSON.$P$1];IF(ISNA([.$W194]);&quot;null&quot;;[.$W194]);[$JSON.$Q$1];[.$Y194];[$JSON.$R$1];IF([.$Z194];&quot;true&quot;;&quot;false&quot;);[$JSON.$S$1];[.$A194];[$JSON.$T$1];[.$B194];[$JSON.$U$1])" office:value-type="string" office:string-value="{&quot;id&quot;:&quot;2-61&quot;,&quot;name&quot;:&quot;リドロー&quot;,&quot;displayName&quot;:&quot;リドロー&quot;,&quot;kana&quot;:&quot;りどろー&quot;,&quot;traitText&quot;:null,&quot;ruleText&quot;:&quot;2ドローして、自分の手札1枚を墓地に置く。&quot;,&quot;legacyText&quot;:&quot;冥府発動&quot;,&quot;imageUrl&quot;:&quot;https://one-draw.jp/ijinden/cardlist/002/card/02_061.png&quot;,&quot;expansion&quot;:25,&quot;rarity&quot;:1,&quot;type&quot;:3,&quot;level&quot;:2,&quot;color&quot;:2,&quot;term&quot;:0,&quot;trait&quot;:0,&quot;power&quot;:null,&quot;legacy&quot;:2,&quot;anyNumCopies&quot;:false,&quot;orderTable&quot;:193,&quot;orderDeck&quot;:375}," calcext:value-type="string">
            <text:p>{"id":"2-61","name":"リドロー","displayName":"リドロー","kana":"りどろー","traitText":null,"ruleText":"2ドローして、自分の手札1枚を墓地に置く。","legacyText":"冥府発動","imageUrl":"https://one-draw.jp/ijinden/cardlist/002/card/02_061.png","expansion":25,"rarity":1,"type":3,"level":2,"color":2,"term":0,"trait":0,"power":null,"legacy":2,"anyNumCopies":false,"orderTable":193,"orderDeck":375},</text:p>
          </table:table-cell>
          <table:table-cell table:number-columns-repeated="16356"/>
        </table:table-row>
        <table:table-row table:style-name="ro2">
          <table:table-cell table:style-name="ce11" office:value-type="float" office:value="194" calcext:value-type="float">
            <text:p>194</text:p>
          </table:table-cell>
          <table:table-cell table:style-name="ce11" office:value-type="float" office:value="404" calcext:value-type="float">
            <text:p>404</text:p>
          </table:table-cell>
          <table:table-cell table:style-name="ce21" office:value-type="string" calcext:value-type="string">
            <text:p>2-62</text:p>
          </table:table-cell>
          <table:table-cell table:style-name="ce21" office:value-type="float" office:value="62" calcext:value-type="float">
            <text:p>62</text:p>
          </table:table-cell>
          <table:table-cell table:style-name="ce11" office:value-type="string" calcext:value-type="string">
            <text:p>テンペスト</text:p>
          </table:table-cell>
          <table:table-cell table:style-name="ce11" table:formula="of:=[.E195]" office:value-type="string" office:string-value="テンペスト" calcext:value-type="string">
            <text:p>テンペスト</text:p>
          </table:table-cell>
          <table:table-cell table:style-name="ce11" office:value-type="string" calcext:value-type="string">
            <text:p>てんぺすと</text:p>
          </table:table-cell>
          <table:table-cell table:style-name="ce11" office:value-type="string" calcext:value-type="string">
            <text:p>第２弾ブースターパック</text:p>
          </table:table-cell>
          <table:table-cell table:style-name="ce11" table:formula="of:=VLOOKUP([.H195];[$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5];[$種類番号.$A$1:$種類番号.$B$4];2;0)" office:value-type="float" office:value="3" calcext:value-type="float">
            <text:p>3</text:p>
          </table:table-cell>
          <table:table-cell table:style-name="ce11" office:value-type="string" calcext:value-type="string">
            <text:p>青</text:p>
          </table:table-cell>
          <table:table-cell table:style-name="ce11" table:formula="of:=VLOOKUP([.N195];[$色番号.$A$1:$色番号.$B$10];2;0)" office:value-type="float" office:value="2" calcext:value-type="float">
            <text:p>2</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95];[$特性番号.$A$1:$特性番号.$B$8];2;0);0)" office:value-type="float" office:value="0" calcext:value-type="float">
            <text:p>0</text:p>
          </table:table-cell>
          <table:table-cell table:style-name="ce11" office:value-type="string" calcext:value-type="string">
            <text:p>相手の戦場の寝ているイジンすべて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2.png</text:p>
          </table:table-cell>
          <table:table-cell table:style-name="ce11" table:formula="of:=CONCATENATE([$JSON.$A$1];[.$C195];[$JSON.$B$1];[.$E195];[$JSON.$C$1];[.F195];[$JSON.$D$1];[.$G195];[$JSON.$E$1];IF(ISNA([.$T195]);&quot;null&quot;;&quot;&quot;&quot;&quot;&amp;[.$T195]&amp;&quot;&quot;&quot;&quot;);[$JSON.$F$1];[.$V195];[$JSON.$G$1];IF(ISNA([.$X195]);&quot;null&quot;;&quot;&quot;&quot;&quot;&amp;[.$X195]&amp;&quot;&quot;&quot;&quot;);[$JSON.$H$1];[.$AA195];[$JSON.$I$1];[.$I195];[$JSON.$J$1];[.K195];[$JSON.$K$1];[.$M195];[$JSON.$L$1];[.$P195];[$JSON.$M$1];[.$O195];[$JSON.$N$1];[.$S195];[$JSON.$O$1];[.$U195];[$JSON.$P$1];IF(ISNA([.$W195]);&quot;null&quot;;[.$W195]);[$JSON.$Q$1];[.$Y195];[$JSON.$R$1];IF([.$Z195];&quot;true&quot;;&quot;false&quot;);[$JSON.$S$1];[.$A195];[$JSON.$T$1];[.$B195];[$JSON.$U$1])" office:value-type="string" office:string-value="{&quot;id&quot;:&quot;2-62&quot;,&quot;name&quot;:&quot;テンペスト&quot;,&quot;displayName&quot;:&quot;テンペスト&quot;,&quot;kana&quot;:&quot;てんぺすと&quot;,&quot;traitText&quot;:null,&quot;ruleText&quot;:&quot;相手の戦場の寝ているイジンすべてを手札に戻す。&quot;,&quot;legacyText&quot;:&quot;冥府発動&quot;,&quot;imageUrl&quot;:&quot;https://one-draw.jp/ijinden/cardlist/002/card/02_062.png&quot;,&quot;expansion&quot;:25,&quot;rarity&quot;:1,&quot;type&quot;:3,&quot;level&quot;:4,&quot;color&quot;:2,&quot;term&quot;:0,&quot;trait&quot;:0,&quot;power&quot;:null,&quot;legacy&quot;:2,&quot;anyNumCopies&quot;:false,&quot;orderTable&quot;:194,&quot;orderDeck&quot;:404}," calcext:value-type="string">
            <text:p>{"id":"2-62","name":"テンペスト","displayName":"テンペスト","kana":"てんぺすと","traitText":null,"ruleText":"相手の戦場の寝ているイジンすべてを手札に戻す。","legacyText":"冥府発動","imageUrl":"https://one-draw.jp/ijinden/cardlist/002/card/02_062.png","expansion":25,"rarity":1,"type":3,"level":4,"color":2,"term":0,"trait":0,"power":null,"legacy":2,"anyNumCopies":false,"orderTable":194,"orderDeck":404},</text:p>
          </table:table-cell>
          <table:table-cell table:number-columns-repeated="16356"/>
        </table:table-row>
        <table:table-row table:style-name="ro2">
          <table:table-cell table:style-name="ce11" office:value-type="float" office:value="195" calcext:value-type="float">
            <text:p>195</text:p>
          </table:table-cell>
          <table:table-cell table:style-name="ce11" office:value-type="float" office:value="408" calcext:value-type="float">
            <text:p>408</text:p>
          </table:table-cell>
          <table:table-cell table:style-name="ce21" office:value-type="string" calcext:value-type="string">
            <text:p>2-63</text:p>
          </table:table-cell>
          <table:table-cell table:style-name="ce21" office:value-type="float" office:value="63" calcext:value-type="float">
            <text:p>63</text:p>
          </table:table-cell>
          <table:table-cell table:style-name="ce11" office:value-type="string" calcext:value-type="string">
            <text:p>ミューテイション</text:p>
          </table:table-cell>
          <table:table-cell table:style-name="ce11" table:formula="of:=[.E196]" office:value-type="string" office:string-value="ミューテイション" calcext:value-type="string">
            <text:p>ミューテイション</text:p>
          </table:table-cell>
          <table:table-cell table:style-name="ce11" office:value-type="string" calcext:value-type="string">
            <text:p>みゅーていしょん</text:p>
          </table:table-cell>
          <table:table-cell table:style-name="ce11" office:value-type="string" calcext:value-type="string">
            <text:p>第２弾ブースターパック</text:p>
          </table:table-cell>
          <table:table-cell table:style-name="ce11" table:formula="of:=VLOOKUP([.H196];[$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9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6];[$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6];[$色番号.$A$1:$色番号.$B$10];2;0)" office:value-type="float" office:value="4" calcext:value-type="float">
            <text:p>4</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96];[$特性番号.$A$1:$特性番号.$B$8];2;0);0)" office:value-type="float" office:value="0" calcext:value-type="float">
            <text:p>0</text:p>
          </table:table-cell>
          <table:table-cell table:style-name="ce11" office:value-type="string" calcext:value-type="string">
            <text:p>戦場のガーディアン1体か、魔力ゾーンの裏のカード1つを指定して発動できる。そのカードを墓地に置き、レベル6以下のイジンなら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9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3.png</text:p>
          </table:table-cell>
          <table:table-cell table:style-name="ce11" table:formula="of:=CONCATENATE([$JSON.$A$1];[.$C196];[$JSON.$B$1];[.$E196];[$JSON.$C$1];[.F196];[$JSON.$D$1];[.$G196];[$JSON.$E$1];IF(ISNA([.$T196]);&quot;null&quot;;&quot;&quot;&quot;&quot;&amp;[.$T196]&amp;&quot;&quot;&quot;&quot;);[$JSON.$F$1];[.$V196];[$JSON.$G$1];IF(ISNA([.$X196]);&quot;null&quot;;&quot;&quot;&quot;&quot;&amp;[.$X196]&amp;&quot;&quot;&quot;&quot;);[$JSON.$H$1];[.$AA196];[$JSON.$I$1];[.$I196];[$JSON.$J$1];[.K196];[$JSON.$K$1];[.$M196];[$JSON.$L$1];[.$P196];[$JSON.$M$1];[.$O196];[$JSON.$N$1];[.$S196];[$JSON.$O$1];[.$U196];[$JSON.$P$1];IF(ISNA([.$W196]);&quot;null&quot;;[.$W196]);[$JSON.$Q$1];[.$Y196];[$JSON.$R$1];IF([.$Z196];&quot;true&quot;;&quot;false&quot;);[$JSON.$S$1];[.$A196];[$JSON.$T$1];[.$B196];[$JSON.$U$1])" office:value-type="string" office:string-value="{&quot;id&quot;:&quot;2-63&quot;,&quot;name&quot;:&quot;ミューテイション&quot;,&quot;displayName&quot;:&quot;ミューテイション&quot;,&quot;kana&quot;:&quot;みゅーていしょん&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rarity&quot;:1,&quot;type&quot;:3,&quot;level&quot;:4,&quot;color&quot;:4,&quot;term&quot;:0,&quot;trait&quot;:0,&quot;power&quot;:null,&quot;legacy&quot;:1,&quot;anyNumCopies&quot;:false,&quot;orderTable&quot;:195,&quot;orderDeck&quot;:408}," calcext:value-type="string">
            <text:p>{"id":"2-63","name":"ミューテイション","displayName":"ミューテイション","kana":"みゅーていしょん","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rarity":1,"type":3,"level":4,"color":4,"term":0,"trait":0,"power":null,"legacy":1,"anyNumCopies":false,"orderTable":195,"orderDeck":408},</text:p>
          </table:table-cell>
          <table:table-cell table:number-columns-repeated="16356"/>
        </table:table-row>
        <table:table-row table:style-name="ro2">
          <table:table-cell table:style-name="ce11" office:value-type="float" office:value="196" calcext:value-type="float">
            <text:p>196</text:p>
          </table:table-cell>
          <table:table-cell table:style-name="ce11" office:value-type="float" office:value="417" calcext:value-type="float">
            <text:p>417</text:p>
          </table:table-cell>
          <table:table-cell table:style-name="ce21" office:value-type="string" calcext:value-type="string">
            <text:p>2-64</text:p>
          </table:table-cell>
          <table:table-cell table:style-name="ce21" office:value-type="float" office:value="64" calcext:value-type="float">
            <text:p>64</text:p>
          </table:table-cell>
          <table:table-cell table:style-name="ce11" office:value-type="string" calcext:value-type="string">
            <text:p>ライブラリー</text:p>
          </table:table-cell>
          <table:table-cell table:style-name="ce11" table:formula="of:=[.E197]" office:value-type="string" office:string-value="ライブラリー" calcext:value-type="string">
            <text:p>ライブラリー</text:p>
          </table:table-cell>
          <table:table-cell table:style-name="ce11" office:value-type="string" calcext:value-type="string">
            <text:p>らいぶらりー</text:p>
          </table:table-cell>
          <table:table-cell table:style-name="ce11" office:value-type="string" calcext:value-type="string">
            <text:p>第２弾ブースターパック</text:p>
          </table:table-cell>
          <table:table-cell table:style-name="ce11" table:formula="of:=VLOOKUP([.H197];[$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97];[$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7];[$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7];[$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97];[$特性番号.$A$1:$特性番号.$B$8];2;0);0)" office:value-type="float" office:value="0" calcext:value-type="float">
            <text:p>0</text:p>
          </table:table-cell>
          <table:table-cell table:style-name="ce11" office:value-type="string" calcext:value-type="string">
            <text:p>自分の戦場のガーディアンすべてを裏のまま魔力ゾーンに置き、自分の山札の上から2枚をガーディアンにして戦場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19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4.png</text:p>
          </table:table-cell>
          <table:table-cell table:style-name="ce11" table:formula="of:=CONCATENATE([$JSON.$A$1];[.$C197];[$JSON.$B$1];[.$E197];[$JSON.$C$1];[.F197];[$JSON.$D$1];[.$G197];[$JSON.$E$1];IF(ISNA([.$T197]);&quot;null&quot;;&quot;&quot;&quot;&quot;&amp;[.$T197]&amp;&quot;&quot;&quot;&quot;);[$JSON.$F$1];[.$V197];[$JSON.$G$1];IF(ISNA([.$X197]);&quot;null&quot;;&quot;&quot;&quot;&quot;&amp;[.$X197]&amp;&quot;&quot;&quot;&quot;);[$JSON.$H$1];[.$AA197];[$JSON.$I$1];[.$I197];[$JSON.$J$1];[.K197];[$JSON.$K$1];[.$M197];[$JSON.$L$1];[.$P197];[$JSON.$M$1];[.$O197];[$JSON.$N$1];[.$S197];[$JSON.$O$1];[.$U197];[$JSON.$P$1];IF(ISNA([.$W197]);&quot;null&quot;;[.$W197]);[$JSON.$Q$1];[.$Y197];[$JSON.$R$1];IF([.$Z197];&quot;true&quot;;&quot;false&quot;);[$JSON.$S$1];[.$A197];[$JSON.$T$1];[.$B197];[$JSON.$U$1])" office:value-type="string" office:string-value="{&quot;id&quot;:&quot;2-64&quot;,&quot;name&quot;:&quot;ライブラリー&quot;,&quot;displayName&quot;:&quot;ライブラリー&quot;,&quot;kana&quot;:&quot;らいぶらり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rarity&quot;:1,&quot;type&quot;:3,&quot;level&quot;:5,&quot;color&quot;:4,&quot;term&quot;:0,&quot;trait&quot;:0,&quot;power&quot;:null,&quot;legacy&quot;:1,&quot;anyNumCopies&quot;:false,&quot;orderTable&quot;:196,&quot;orderDeck&quot;:417}," calcext:value-type="string">
            <text:p>{"id":"2-64","name":"ライブラリー","displayName":"ライブラリー","kana":"らいぶらりー","traitText":null,"ruleText":"自分の戦場のガーディアンすべてを裏のまま魔力ゾーンに置き、自分の山札の上から2枚をガーディアンにして戦場に置く。","legacyText":"魔力化","imageUrl":"https://one-draw.jp/ijinden/cardlist/002/card/02_064.png","expansion":25,"rarity":1,"type":3,"level":5,"color":4,"term":0,"trait":0,"power":null,"legacy":1,"anyNumCopies":false,"orderTable":196,"orderDeck":417},</text:p>
          </table:table-cell>
          <table:table-cell table:number-columns-repeated="16356"/>
        </table:table-row>
        <table:table-row table:style-name="ro2">
          <table:table-cell table:style-name="ce11" office:value-type="float" office:value="197" calcext:value-type="float">
            <text:p>197</text:p>
          </table:table-cell>
          <table:table-cell table:style-name="ce11" office:value-type="float" office:value="361" calcext:value-type="float">
            <text:p>361</text:p>
          </table:table-cell>
          <table:table-cell table:style-name="ce21" office:value-type="string" calcext:value-type="string">
            <text:p>2-65</text:p>
          </table:table-cell>
          <table:table-cell table:style-name="ce21" office:value-type="float" office:value="65" calcext:value-type="float">
            <text:p>65</text:p>
          </table:table-cell>
          <table:table-cell table:style-name="ce11" office:value-type="string" calcext:value-type="string">
            <text:p>チャージ</text:p>
          </table:table-cell>
          <table:table-cell table:style-name="ce11" table:formula="of:=[.E198]" office:value-type="string" office:string-value="チャージ" calcext:value-type="string">
            <text:p>チャージ</text:p>
          </table:table-cell>
          <table:table-cell table:style-name="ce11" office:value-type="string" calcext:value-type="string">
            <text:p>ちゃーじ</text:p>
          </table:table-cell>
          <table:table-cell table:style-name="ce11" office:value-type="string" calcext:value-type="string">
            <text:p>第２弾ブースターパック</text:p>
          </table:table-cell>
          <table:table-cell table:style-name="ce11" table:formula="of:=VLOOKUP([.H198];[$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9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8];[$種類番号.$A$1:$種類番号.$B$4];2;0)" office:value-type="float" office:value="3" calcext:value-type="float">
            <text:p>3</text:p>
          </table:table-cell>
          <table:table-cell table:style-name="ce11" office:value-type="string" calcext:value-type="string">
            <text:p>緑</text:p>
          </table:table-cell>
          <table:table-cell table:style-name="ce11" table:formula="of:=VLOOKUP([.N198];[$色番号.$A$1:$色番号.$B$10];2;0)" office:value-type="float" office:value="4" calcext:value-type="float">
            <text:p>4</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19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98];[$特性番号.$A$1:$特性番号.$B$8];2;0);0)" office:value-type="float" office:value="0" calcext:value-type="float">
            <text:p>0</text:p>
          </table:table-cell>
          <table:table-cell table:style-name="ce11" office:value-type="string" calcext:value-type="string">
            <text:p>マリョク配置権+1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198];[$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5.png</text:p>
          </table:table-cell>
          <table:table-cell table:style-name="ce11" table:formula="of:=CONCATENATE([$JSON.$A$1];[.$C198];[$JSON.$B$1];[.$E198];[$JSON.$C$1];[.F198];[$JSON.$D$1];[.$G198];[$JSON.$E$1];IF(ISNA([.$T198]);&quot;null&quot;;&quot;&quot;&quot;&quot;&amp;[.$T198]&amp;&quot;&quot;&quot;&quot;);[$JSON.$F$1];[.$V198];[$JSON.$G$1];IF(ISNA([.$X198]);&quot;null&quot;;&quot;&quot;&quot;&quot;&amp;[.$X198]&amp;&quot;&quot;&quot;&quot;);[$JSON.$H$1];[.$AA198];[$JSON.$I$1];[.$I198];[$JSON.$J$1];[.K198];[$JSON.$K$1];[.$M198];[$JSON.$L$1];[.$P198];[$JSON.$M$1];[.$O198];[$JSON.$N$1];[.$S198];[$JSON.$O$1];[.$U198];[$JSON.$P$1];IF(ISNA([.$W198]);&quot;null&quot;;[.$W198]);[$JSON.$Q$1];[.$Y198];[$JSON.$R$1];IF([.$Z198];&quot;true&quot;;&quot;false&quot;);[$JSON.$S$1];[.$A198];[$JSON.$T$1];[.$B198];[$JSON.$U$1])" office:value-type="string" office:string-value="{&quot;id&quot;:&quot;2-65&quot;,&quot;name&quot;:&quot;チャージ&quot;,&quot;displayName&quot;:&quot;チャージ&quot;,&quot;kana&quot;:&quot;ちゃーじ&quot;,&quot;traitText&quot;:null,&quot;ruleText&quot;:&quot;マリョク配置権+1する。&quot;,&quot;legacyText&quot;:&quot;手札に戻す&quot;,&quot;imageUrl&quot;:&quot;https://one-draw.jp/ijinden/cardlist/002/card/02_065.png&quot;,&quot;expansion&quot;:25,&quot;rarity&quot;:1,&quot;type&quot;:3,&quot;level&quot;:1,&quot;color&quot;:4,&quot;term&quot;:0,&quot;trait&quot;:0,&quot;power&quot;:null,&quot;legacy&quot;:5,&quot;anyNumCopies&quot;:false,&quot;orderTable&quot;:197,&quot;orderDeck&quot;:361}," calcext:value-type="string">
            <text:p>{"id":"2-65","name":"チャージ","displayName":"チャージ","kana":"ちゃーじ","traitText":null,"ruleText":"マリョク配置権+1する。","legacyText":"手札に戻す","imageUrl":"https://one-draw.jp/ijinden/cardlist/002/card/02_065.png","expansion":25,"rarity":1,"type":3,"level":1,"color":4,"term":0,"trait":0,"power":null,"legacy":5,"anyNumCopies":false,"orderTable":197,"orderDeck":361},</text:p>
          </table:table-cell>
          <table:table-cell table:number-columns-repeated="16356"/>
        </table:table-row>
        <table:table-row table:style-name="ro2">
          <table:table-cell table:style-name="ce11" office:value-type="float" office:value="198" calcext:value-type="float">
            <text:p>198</text:p>
          </table:table-cell>
          <table:table-cell table:style-name="ce11" office:value-type="float" office:value="419" calcext:value-type="float">
            <text:p>419</text:p>
          </table:table-cell>
          <table:table-cell table:style-name="ce21" office:value-type="string" calcext:value-type="string">
            <text:p>2-66</text:p>
          </table:table-cell>
          <table:table-cell table:style-name="ce21" office:value-type="float" office:value="66" calcext:value-type="float">
            <text:p>66</text:p>
          </table:table-cell>
          <table:table-cell table:style-name="ce11" office:value-type="string" calcext:value-type="string">
            <text:p>カタストロフィ</text:p>
          </table:table-cell>
          <table:table-cell table:style-name="ce11" table:formula="of:=[.E199]" office:value-type="string" office:string-value="カタストロフィ" calcext:value-type="string">
            <text:p>カタストロフィ</text:p>
          </table:table-cell>
          <table:table-cell table:style-name="ce11" office:value-type="string" calcext:value-type="string">
            <text:p>かたすとろふぃ</text:p>
          </table:table-cell>
          <table:table-cell table:style-name="ce11" office:value-type="string" calcext:value-type="string">
            <text:p>第２弾ブースターパック</text:p>
          </table:table-cell>
          <table:table-cell table:style-name="ce11" table:formula="of:=VLOOKUP([.H199];[$収録番号.$A$1:$収録番号.$B$10];2;0)" office:value-type="float" office:value="25" calcext:value-type="float">
            <text:p>25</text:p>
          </table:table-cell>
          <table:table-cell table:style-name="ce11" office:value-type="string" calcext:value-type="string">
            <text:p>N</text:p>
          </table:table-cell>
          <table:table-cell table:style-name="ce11" table:formula="of:=VLOOKUP([.J19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199];[$種類番号.$A$1:$種類番号.$B$4];2;0)" office:value-type="float" office:value="3" calcext:value-type="float">
            <text:p>3</text:p>
          </table:table-cell>
          <table:table-cell table:style-name="ce11" office:value-type="string" calcext:value-type="string">
            <text:p>黄</text:p>
          </table:table-cell>
          <table:table-cell table:style-name="ce11" table:formula="of:=VLOOKUP([.N199];[$色番号.$A$1:$色番号.$B$10];2;0)" office:value-type="float" office:value="8" calcext:value-type="float">
            <text:p>8</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19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199];[$特性番号.$A$1:$特性番号.$B$8];2;0);0)" office:value-type="float" office:value="0" calcext:value-type="float">
            <text:p>0</text:p>
          </table:table-cell>
          <table:table-cell table:style-name="ce11" office:value-type="string" calcext:value-type="string">
            <text:p>自分の戦場のガーディアン1体を指定して発動できる。そのガーディアンを山札の下に戻して、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199];[$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6.png</text:p>
          </table:table-cell>
          <table:table-cell table:style-name="ce11" table:formula="of:=CONCATENATE([$JSON.$A$1];[.$C199];[$JSON.$B$1];[.$E199];[$JSON.$C$1];[.F199];[$JSON.$D$1];[.$G199];[$JSON.$E$1];IF(ISNA([.$T199]);&quot;null&quot;;&quot;&quot;&quot;&quot;&amp;[.$T199]&amp;&quot;&quot;&quot;&quot;);[$JSON.$F$1];[.$V199];[$JSON.$G$1];IF(ISNA([.$X199]);&quot;null&quot;;&quot;&quot;&quot;&quot;&amp;[.$X199]&amp;&quot;&quot;&quot;&quot;);[$JSON.$H$1];[.$AA199];[$JSON.$I$1];[.$I199];[$JSON.$J$1];[.K199];[$JSON.$K$1];[.$M199];[$JSON.$L$1];[.$P199];[$JSON.$M$1];[.$O199];[$JSON.$N$1];[.$S199];[$JSON.$O$1];[.$U199];[$JSON.$P$1];IF(ISNA([.$W199]);&quot;null&quot;;[.$W199]);[$JSON.$Q$1];[.$Y199];[$JSON.$R$1];IF([.$Z199];&quot;true&quot;;&quot;false&quot;);[$JSON.$S$1];[.$A199];[$JSON.$T$1];[.$B199];[$JSON.$U$1])" office:value-type="string" office:string-value="{&quot;id&quot;:&quot;2-66&quot;,&quot;name&quot;:&quot;カタストロフィ&quot;,&quot;displayName&quot;:&quot;カタストロフィ&quot;,&quot;kana&quot;:&quot;かたすとろふぃ&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rarity&quot;:1,&quot;type&quot;:3,&quot;level&quot;:5,&quot;color&quot;:8,&quot;term&quot;:0,&quot;trait&quot;:0,&quot;power&quot;:null,&quot;legacy&quot;:2,&quot;anyNumCopies&quot;:false,&quot;orderTable&quot;:198,&quot;orderDeck&quot;:419}," calcext:value-type="string">
            <text:p>{"id":"2-66","name":"カタストロフィ","displayName":"カタストロフィ","kana":"かたすとろふぃ","traitText":null,"ruleText":"自分の戦場のガーディアン1体を指定して発動できる。そのガーディアンを山札の下に戻して、イジンすべてを破壊する。","legacyText":"冥府発動","imageUrl":"https://one-draw.jp/ijinden/cardlist/002/card/02_066.png","expansion":25,"rarity":1,"type":3,"level":5,"color":8,"term":0,"trait":0,"power":null,"legacy":2,"anyNumCopies":false,"orderTable":198,"orderDeck":419},</text:p>
          </table:table-cell>
          <table:table-cell table:number-columns-repeated="16356"/>
        </table:table-row>
        <table:table-row table:style-name="ro2">
          <table:table-cell table:style-name="ce11" office:value-type="float" office:value="199" calcext:value-type="float">
            <text:p>199</text:p>
          </table:table-cell>
          <table:table-cell table:style-name="ce11" office:value-type="float" office:value="396" calcext:value-type="float">
            <text:p>396</text:p>
          </table:table-cell>
          <table:table-cell table:style-name="ce21" office:value-type="string" calcext:value-type="string">
            <text:p>2-67</text:p>
          </table:table-cell>
          <table:table-cell table:style-name="ce21" office:value-type="float" office:value="67" calcext:value-type="float">
            <text:p>67</text:p>
          </table:table-cell>
          <table:table-cell table:style-name="ce11" office:value-type="string" calcext:value-type="string">
            <text:p>エクスキューション</text:p>
          </table:table-cell>
          <table:table-cell table:style-name="ce11" table:formula="of:=[.E200]" office:value-type="string" office:string-value="エクスキューション" calcext:value-type="string">
            <text:p>エクスキューション</text:p>
          </table:table-cell>
          <table:table-cell table:style-name="ce11" office:value-type="string" calcext:value-type="string">
            <text:p>えくすきゅーしょん</text:p>
          </table:table-cell>
          <table:table-cell table:style-name="ce11" office:value-type="string" calcext:value-type="string">
            <text:p>第２弾ブースターパック</text:p>
          </table:table-cell>
          <table:table-cell table:style-name="ce11" table:formula="of:=VLOOKUP([.H200];[$収録番号.$A$1:$収録番号.$B$10];2;0)" office:value-type="float" office:value="25" calcext:value-type="float">
            <text:p>25</text:p>
          </table:table-cell>
          <table:table-cell table:style-name="ce11" office:value-type="string" calcext:value-type="string">
            <text:p>R</text:p>
          </table:table-cell>
          <table:table-cell table:style-name="ce11" table:formula="of:=VLOOKUP([.J200];[$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00];[$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0];[$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0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00];[$特性番号.$A$1:$特性番号.$B$8];2;0);0)" office:value-type="float" office:value="0" calcext:value-type="float">
            <text:p>0</text:p>
          </table:table-cell>
          <table:table-cell table:style-name="ce11" office:value-type="string" calcext:value-type="string">
            <text:p>戦場のレベル4以下のイジン1体を指定して発動できる。そのイジンを破壊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0];[$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7.png</text:p>
          </table:table-cell>
          <table:table-cell table:style-name="ce11" table:formula="of:=CONCATENATE([$JSON.$A$1];[.$C200];[$JSON.$B$1];[.$E200];[$JSON.$C$1];[.F200];[$JSON.$D$1];[.$G200];[$JSON.$E$1];IF(ISNA([.$T200]);&quot;null&quot;;&quot;&quot;&quot;&quot;&amp;[.$T200]&amp;&quot;&quot;&quot;&quot;);[$JSON.$F$1];[.$V200];[$JSON.$G$1];IF(ISNA([.$X200]);&quot;null&quot;;&quot;&quot;&quot;&quot;&amp;[.$X200]&amp;&quot;&quot;&quot;&quot;);[$JSON.$H$1];[.$AA200];[$JSON.$I$1];[.$I200];[$JSON.$J$1];[.K200];[$JSON.$K$1];[.$M200];[$JSON.$L$1];[.$P200];[$JSON.$M$1];[.$O200];[$JSON.$N$1];[.$S200];[$JSON.$O$1];[.$U200];[$JSON.$P$1];IF(ISNA([.$W200]);&quot;null&quot;;[.$W200]);[$JSON.$Q$1];[.$Y200];[$JSON.$R$1];IF([.$Z200];&quot;true&quot;;&quot;false&quot;);[$JSON.$S$1];[.$A200];[$JSON.$T$1];[.$B200];[$JSON.$U$1])" office:value-type="string" office:string-value="{&quot;id&quot;:&quot;2-67&quot;,&quot;name&quot;:&quot;エクスキューション&quot;,&quot;displayName&quot;:&quot;エクスキューション&quot;,&quot;kana&quot;:&quot;えくすきゅーしょん&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rarity&quot;:2,&quot;type&quot;:3,&quot;level&quot;:3,&quot;color&quot;:8,&quot;term&quot;:0,&quot;trait&quot;:0,&quot;power&quot;:null,&quot;legacy&quot;:2,&quot;anyNumCopies&quot;:false,&quot;orderTable&quot;:199,&quot;orderDeck&quot;:396}," calcext:value-type="string">
            <text:p>{"id":"2-67","name":"エクスキューション","displayName":"エクスキューション","kana":"えくすきゅーしょん","traitText":null,"ruleText":"戦場のレベル4以下のイジン1体を指定して発動できる。そのイジンを破壊する。","legacyText":"冥府発動","imageUrl":"https://one-draw.jp/ijinden/cardlist/002/card/02_067.png","expansion":25,"rarity":2,"type":3,"level":3,"color":8,"term":0,"trait":0,"power":null,"legacy":2,"anyNumCopies":false,"orderTable":199,"orderDeck":396},</text:p>
          </table:table-cell>
          <table:table-cell table:number-columns-repeated="16356"/>
        </table:table-row>
        <table:table-row table:style-name="ro2">
          <table:table-cell table:style-name="ce11" office:value-type="float" office:value="200" calcext:value-type="float">
            <text:p>200</text:p>
          </table:table-cell>
          <table:table-cell table:style-name="ce11" office:value-type="float" office:value="409" calcext:value-type="float">
            <text:p>409</text:p>
          </table:table-cell>
          <table:table-cell table:style-name="ce21" office:value-type="string" calcext:value-type="string">
            <text:p>2-68</text:p>
          </table:table-cell>
          <table:table-cell table:style-name="ce21" office:value-type="float" office:value="68" calcext:value-type="float">
            <text:p>68</text:p>
          </table:table-cell>
          <table:table-cell table:style-name="ce11" office:value-type="string" calcext:value-type="string">
            <text:p>メロウ</text:p>
          </table:table-cell>
          <table:table-cell table:style-name="ce11" table:formula="of:=[.E201]" office:value-type="string" office:string-value="メロウ" calcext:value-type="string">
            <text:p>メロウ</text:p>
          </table:table-cell>
          <table:table-cell table:style-name="ce11" office:value-type="string" calcext:value-type="string">
            <text:p>めろう</text:p>
          </table:table-cell>
          <table:table-cell table:style-name="ce11" office:value-type="string" calcext:value-type="string">
            <text:p>第２弾ブースターパック</text:p>
          </table:table-cell>
          <table:table-cell table:style-name="ce11" table:formula="of:=VLOOKUP([.H201];[$収録番号.$A$1:$収録番号.$B$10];2;0)" office:value-type="float" office:value="25" calcext:value-type="float">
            <text:p>25</text:p>
          </table:table-cell>
          <table:table-cell table:style-name="ce11" office:value-type="string" calcext:value-type="string">
            <text:p>N</text:p>
          </table:table-cell>
          <table:table-cell table:style-name="ce11" table:formula="of:=VLOOKUP([.J20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1];[$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1];[$色番号.$A$1:$色番号.$B$10];2;0)" office:value-type="float" office:value="8" calcext:value-type="float">
            <text:p>8</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0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01];[$特性番号.$A$1:$特性番号.$B$8];2;0);0)" office:value-type="float" office:value="0" calcext:value-type="float">
            <text:p>0</text:p>
          </table:table-cell>
          <table:table-cell table:style-name="ce11" office:value-type="string" calcext:value-type="string">
            <text:p>戦場のレベル7以下のカード1つを指定して発動できる。そのカードをガーディアンに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8.png</text:p>
          </table:table-cell>
          <table:table-cell table:style-name="ce11" table:formula="of:=CONCATENATE([$JSON.$A$1];[.$C201];[$JSON.$B$1];[.$E201];[$JSON.$C$1];[.F201];[$JSON.$D$1];[.$G201];[$JSON.$E$1];IF(ISNA([.$T201]);&quot;null&quot;;&quot;&quot;&quot;&quot;&amp;[.$T201]&amp;&quot;&quot;&quot;&quot;);[$JSON.$F$1];[.$V201];[$JSON.$G$1];IF(ISNA([.$X201]);&quot;null&quot;;&quot;&quot;&quot;&quot;&amp;[.$X201]&amp;&quot;&quot;&quot;&quot;);[$JSON.$H$1];[.$AA201];[$JSON.$I$1];[.$I201];[$JSON.$J$1];[.K201];[$JSON.$K$1];[.$M201];[$JSON.$L$1];[.$P201];[$JSON.$M$1];[.$O201];[$JSON.$N$1];[.$S201];[$JSON.$O$1];[.$U201];[$JSON.$P$1];IF(ISNA([.$W201]);&quot;null&quot;;[.$W201]);[$JSON.$Q$1];[.$Y201];[$JSON.$R$1];IF([.$Z201];&quot;true&quot;;&quot;false&quot;);[$JSON.$S$1];[.$A201];[$JSON.$T$1];[.$B201];[$JSON.$U$1])" office:value-type="string" office:string-value="{&quot;id&quot;:&quot;2-68&quot;,&quot;name&quot;:&quot;メロウ&quot;,&quot;displayName&quot;:&quot;メロウ&quot;,&quot;kana&quot;:&quot;めろう&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rarity&quot;:1,&quot;type&quot;:3,&quot;level&quot;:4,&quot;color&quot;:8,&quot;term&quot;:0,&quot;trait&quot;:0,&quot;power&quot;:null,&quot;legacy&quot;:2,&quot;anyNumCopies&quot;:false,&quot;orderTable&quot;:200,&quot;orderDeck&quot;:409}," calcext:value-type="string">
            <text:p>{"id":"2-68","name":"メロウ","displayName":"メロウ","kana":"めろう","traitText":null,"ruleText":"戦場のレベル7以下のカード1つを指定して発動できる。そのカードをガーディアンにする。","legacyText":"冥府発動","imageUrl":"https://one-draw.jp/ijinden/cardlist/002/card/02_068.png","expansion":25,"rarity":1,"type":3,"level":4,"color":8,"term":0,"trait":0,"power":null,"legacy":2,"anyNumCopies":false,"orderTable":200,"orderDeck":409},</text:p>
          </table:table-cell>
          <table:table-cell table:number-columns-repeated="16356"/>
        </table:table-row>
        <table:table-row table:style-name="ro2">
          <table:table-cell table:style-name="ce11" office:value-type="float" office:value="201" calcext:value-type="float">
            <text:p>201</text:p>
          </table:table-cell>
          <table:table-cell table:style-name="ce11" office:value-type="float" office:value="397" calcext:value-type="float">
            <text:p>397</text:p>
          </table:table-cell>
          <table:table-cell table:style-name="ce21" office:value-type="string" calcext:value-type="string">
            <text:p>2-69</text:p>
          </table:table-cell>
          <table:table-cell table:style-name="ce21" office:value-type="float" office:value="69" calcext:value-type="float">
            <text:p>69</text:p>
          </table:table-cell>
          <table:table-cell table:style-name="ce11" office:value-type="string" calcext:value-type="string">
            <text:p>スカーレット</text:p>
          </table:table-cell>
          <table:table-cell table:style-name="ce11" table:formula="of:=[.E202]" office:value-type="string" office:string-value="スカーレット" calcext:value-type="string">
            <text:p>スカーレット</text:p>
          </table:table-cell>
          <table:table-cell table:style-name="ce11" office:value-type="string" calcext:value-type="string">
            <text:p>すかーれっと</text:p>
          </table:table-cell>
          <table:table-cell table:style-name="ce11" office:value-type="string" calcext:value-type="string">
            <text:p>第２弾ブースターパック</text:p>
          </table:table-cell>
          <table:table-cell table:style-name="ce11" table:formula="of:=VLOOKUP([.H202];[$収録番号.$A$1:$収録番号.$B$10];2;0)" office:value-type="float" office:value="25" calcext:value-type="float">
            <text:p>25</text:p>
          </table:table-cell>
          <table:table-cell table:style-name="ce11" office:value-type="string" calcext:value-type="string">
            <text:p>N</text:p>
          </table:table-cell>
          <table:table-cell table:style-name="ce11" table:formula="of:=VLOOKUP([.J20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2];[$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2];[$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赤魔導</text:p>
          </table:table-cell>
          <table:table-cell table:style-name="ce11" table:formula="of:=IFERROR(VLOOKUP([.$R202];[$能力語番号.$A$1:$能力語番号.$B$11];2;0);0)" office:value-type="float" office:value="48" calcext:value-type="float">
            <text:p>48</text:p>
          </table:table-cell>
          <table:table-cell table:formula="of:=NA()" office:value-type="string" office:string-value="" calcext:value-type="error">
            <text:p>#N/A</text:p>
          </table:table-cell>
          <table:table-cell table:style-name="ce11" table:formula="of:=IFERROR(VLOOKUP([.$T202];[$特性番号.$A$1:$特性番号.$B$8];2;0);0)" office:value-type="float" office:value="0" calcext:value-type="float">
            <text:p>0</text:p>
          </table:table-cell>
          <table:table-cell table:style-name="ce11"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69.png</text:p>
          </table:table-cell>
          <table:table-cell table:style-name="ce11" table:formula="of:=CONCATENATE([$JSON.$A$1];[.$C202];[$JSON.$B$1];[.$E202];[$JSON.$C$1];[.F202];[$JSON.$D$1];[.$G202];[$JSON.$E$1];IF(ISNA([.$T202]);&quot;null&quot;;&quot;&quot;&quot;&quot;&amp;[.$T202]&amp;&quot;&quot;&quot;&quot;);[$JSON.$F$1];[.$V202];[$JSON.$G$1];IF(ISNA([.$X202]);&quot;null&quot;;&quot;&quot;&quot;&quot;&amp;[.$X202]&amp;&quot;&quot;&quot;&quot;);[$JSON.$H$1];[.$AA202];[$JSON.$I$1];[.$I202];[$JSON.$J$1];[.K202];[$JSON.$K$1];[.$M202];[$JSON.$L$1];[.$P202];[$JSON.$M$1];[.$O202];[$JSON.$N$1];[.$S202];[$JSON.$O$1];[.$U202];[$JSON.$P$1];IF(ISNA([.$W202]);&quot;null&quot;;[.$W202]);[$JSON.$Q$1];[.$Y202];[$JSON.$R$1];IF([.$Z202];&quot;true&quot;;&quot;false&quot;);[$JSON.$S$1];[.$A202];[$JSON.$T$1];[.$B202];[$JSON.$U$1])" office:value-type="string" office:string-value="{&quot;id&quot;:&quot;2-69&quot;,&quot;name&quot;:&quot;スカーレット&quot;,&quot;displayName&quot;:&quot;スカーレット&quot;,&quot;kana&quot;:&quot;すかーれっと&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rarity&quot;:1,&quot;type&quot;:3,&quot;level&quot;:3,&quot;color&quot;:8,&quot;term&quot;:48,&quot;trait&quot;:0,&quot;power&quot;:null,&quot;legacy&quot;:2,&quot;anyNumCopies&quot;:false,&quot;orderTable&quot;:201,&quot;orderDeck&quot;:397}," calcext:value-type="string">
            <text:p>{"id":"2-69","name":"スカーレット","displayName":"スカーレット","kana":"すかーれっと","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rarity":1,"type":3,"level":3,"color":8,"term":48,"trait":0,"power":null,"legacy":2,"anyNumCopies":false,"orderTable":201,"orderDeck":397},</text:p>
          </table:table-cell>
          <table:table-cell table:number-columns-repeated="16356"/>
        </table:table-row>
        <table:table-row table:style-name="ro2">
          <table:table-cell table:style-name="ce11" office:value-type="float" office:value="202" calcext:value-type="float">
            <text:p>202</text:p>
          </table:table-cell>
          <table:table-cell table:style-name="ce11" office:value-type="float" office:value="398" calcext:value-type="float">
            <text:p>398</text:p>
          </table:table-cell>
          <table:table-cell table:style-name="ce21" office:value-type="string" calcext:value-type="string">
            <text:p>2-70</text:p>
          </table:table-cell>
          <table:table-cell table:style-name="ce21" office:value-type="float" office:value="70" calcext:value-type="float">
            <text:p>70</text:p>
          </table:table-cell>
          <table:table-cell table:style-name="ce11" office:value-type="string" calcext:value-type="string">
            <text:p>ピーコック</text:p>
          </table:table-cell>
          <table:table-cell table:style-name="ce11" table:formula="of:=[.E203]" office:value-type="string" office:string-value="ピーコック" calcext:value-type="string">
            <text:p>ピーコック</text:p>
          </table:table-cell>
          <table:table-cell table:style-name="ce11" office:value-type="string" calcext:value-type="string">
            <text:p>ぴーこっく</text:p>
          </table:table-cell>
          <table:table-cell table:style-name="ce11" office:value-type="string" calcext:value-type="string">
            <text:p>第２弾ブースターパック</text:p>
          </table:table-cell>
          <table:table-cell table:style-name="ce11" table:formula="of:=VLOOKUP([.H203];[$収録番号.$A$1:$収録番号.$B$10];2;0)" office:value-type="float" office:value="25" calcext:value-type="float">
            <text:p>25</text:p>
          </table:table-cell>
          <table:table-cell table:style-name="ce11" office:value-type="string" calcext:value-type="string">
            <text:p>N</text:p>
          </table:table-cell>
          <table:table-cell table:style-name="ce11" table:formula="of:=VLOOKUP([.J20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3];[$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3];[$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青魔導</text:p>
          </table:table-cell>
          <table:table-cell table:style-name="ce11" table:formula="of:=IFERROR(VLOOKUP([.$R203];[$能力語番号.$A$1:$能力語番号.$B$11];2;0);0)" office:value-type="float" office:value="80" calcext:value-type="float">
            <text:p>80</text:p>
          </table:table-cell>
          <table:table-cell table:formula="of:=NA()" office:value-type="string" office:string-value="" calcext:value-type="error">
            <text:p>#N/A</text:p>
          </table:table-cell>
          <table:table-cell table:style-name="ce11" table:formula="of:=IFERROR(VLOOKUP([.$T203];[$特性番号.$A$1:$特性番号.$B$8];2;0);0)" office:value-type="float" office:value="0" calcext:value-type="float">
            <text:p>0</text:p>
          </table:table-cell>
          <table:table-cell table:style-name="ce11"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3];[$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0.png</text:p>
          </table:table-cell>
          <table:table-cell table:style-name="ce11" table:formula="of:=CONCATENATE([$JSON.$A$1];[.$C203];[$JSON.$B$1];[.$E203];[$JSON.$C$1];[.F203];[$JSON.$D$1];[.$G203];[$JSON.$E$1];IF(ISNA([.$T203]);&quot;null&quot;;&quot;&quot;&quot;&quot;&amp;[.$T203]&amp;&quot;&quot;&quot;&quot;);[$JSON.$F$1];[.$V203];[$JSON.$G$1];IF(ISNA([.$X203]);&quot;null&quot;;&quot;&quot;&quot;&quot;&amp;[.$X203]&amp;&quot;&quot;&quot;&quot;);[$JSON.$H$1];[.$AA203];[$JSON.$I$1];[.$I203];[$JSON.$J$1];[.K203];[$JSON.$K$1];[.$M203];[$JSON.$L$1];[.$P203];[$JSON.$M$1];[.$O203];[$JSON.$N$1];[.$S203];[$JSON.$O$1];[.$U203];[$JSON.$P$1];IF(ISNA([.$W203]);&quot;null&quot;;[.$W203]);[$JSON.$Q$1];[.$Y203];[$JSON.$R$1];IF([.$Z203];&quot;true&quot;;&quot;false&quot;);[$JSON.$S$1];[.$A203];[$JSON.$T$1];[.$B203];[$JSON.$U$1])" office:value-type="string" office:string-value="{&quot;id&quot;:&quot;2-70&quot;,&quot;name&quot;:&quot;ピーコック&quot;,&quot;displayName&quot;:&quot;ピーコック&quot;,&quot;kana&quot;:&quot;ぴーこっく&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rarity&quot;:1,&quot;type&quot;:3,&quot;level&quot;:3,&quot;color&quot;:8,&quot;term&quot;:80,&quot;trait&quot;:0,&quot;power&quot;:null,&quot;legacy&quot;:2,&quot;anyNumCopies&quot;:false,&quot;orderTable&quot;:202,&quot;orderDeck&quot;:398}," calcext:value-type="string">
            <text:p>{"id":"2-70","name":"ピーコック","displayName":"ピーコック","kana":"ぴーこっく","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rarity":1,"type":3,"level":3,"color":8,"term":80,"trait":0,"power":null,"legacy":2,"anyNumCopies":false,"orderTable":202,"orderDeck":398},</text:p>
          </table:table-cell>
          <table:table-cell table:number-columns-repeated="16356"/>
        </table:table-row>
        <table:table-row table:style-name="ro2">
          <table:table-cell table:style-name="ce11" office:value-type="float" office:value="203" calcext:value-type="float">
            <text:p>203</text:p>
          </table:table-cell>
          <table:table-cell table:style-name="ce11" office:value-type="float" office:value="399" calcext:value-type="float">
            <text:p>399</text:p>
          </table:table-cell>
          <table:table-cell table:style-name="ce21" office:value-type="string" calcext:value-type="string">
            <text:p>2-71</text:p>
          </table:table-cell>
          <table:table-cell table:style-name="ce21" office:value-type="float" office:value="71" calcext:value-type="float">
            <text:p>71</text:p>
          </table:table-cell>
          <table:table-cell table:style-name="ce11" office:value-type="string" calcext:value-type="string">
            <text:p>シャトルーズ</text:p>
          </table:table-cell>
          <table:table-cell table:style-name="ce11" table:formula="of:=[.E204]" office:value-type="string" office:string-value="シャトルーズ" calcext:value-type="string">
            <text:p>シャトルーズ</text:p>
          </table:table-cell>
          <table:table-cell table:style-name="ce11" office:value-type="string" calcext:value-type="string">
            <text:p>しゃとるーず</text:p>
          </table:table-cell>
          <table:table-cell table:style-name="ce11" office:value-type="string" calcext:value-type="string">
            <text:p>第２弾ブースターパック</text:p>
          </table:table-cell>
          <table:table-cell table:style-name="ce11" table:formula="of:=VLOOKUP([.H204];[$収録番号.$A$1:$収録番号.$B$10];2;0)" office:value-type="float" office:value="25" calcext:value-type="float">
            <text:p>25</text:p>
          </table:table-cell>
          <table:table-cell table:style-name="ce11" office:value-type="string" calcext:value-type="string">
            <text:p>N</text:p>
          </table:table-cell>
          <table:table-cell table:style-name="ce11" table:formula="of:=VLOOKUP([.J20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04];[$種類番号.$A$1:$種類番号.$B$4];2;0)" office:value-type="float" office:value="3" calcext:value-type="float">
            <text:p>3</text:p>
          </table:table-cell>
          <table:table-cell table:style-name="ce11" office:value-type="string" calcext:value-type="string">
            <text:p>黄</text:p>
          </table:table-cell>
          <table:table-cell table:style-name="ce11" table:formula="of:=VLOOKUP([.N204];[$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string" calcext:value-type="string">
            <text:p>緑魔導</text:p>
          </table:table-cell>
          <table:table-cell table:style-name="ce11" table:formula="of:=IFERROR(VLOOKUP([.$R204];[$能力語番号.$A$1:$能力語番号.$B$11];2;0);0)" office:value-type="float" office:value="144" calcext:value-type="float">
            <text:p>144</text:p>
          </table:table-cell>
          <table:table-cell table:formula="of:=NA()" office:value-type="string" office:string-value="" calcext:value-type="error">
            <text:p>#N/A</text:p>
          </table:table-cell>
          <table:table-cell table:style-name="ce11" table:formula="of:=IFERROR(VLOOKUP([.$T204];[$特性番号.$A$1:$特性番号.$B$8];2;0);0)" office:value-type="float" office:value="0" calcext:value-type="float">
            <text:p>0</text:p>
          </table:table-cell>
          <table:table-cell table:style-name="ce11"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0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1.png</text:p>
          </table:table-cell>
          <table:table-cell table:style-name="ce11" table:formula="of:=CONCATENATE([$JSON.$A$1];[.$C204];[$JSON.$B$1];[.$E204];[$JSON.$C$1];[.F204];[$JSON.$D$1];[.$G204];[$JSON.$E$1];IF(ISNA([.$T204]);&quot;null&quot;;&quot;&quot;&quot;&quot;&amp;[.$T204]&amp;&quot;&quot;&quot;&quot;);[$JSON.$F$1];[.$V204];[$JSON.$G$1];IF(ISNA([.$X204]);&quot;null&quot;;&quot;&quot;&quot;&quot;&amp;[.$X204]&amp;&quot;&quot;&quot;&quot;);[$JSON.$H$1];[.$AA204];[$JSON.$I$1];[.$I204];[$JSON.$J$1];[.K204];[$JSON.$K$1];[.$M204];[$JSON.$L$1];[.$P204];[$JSON.$M$1];[.$O204];[$JSON.$N$1];[.$S204];[$JSON.$O$1];[.$U204];[$JSON.$P$1];IF(ISNA([.$W204]);&quot;null&quot;;[.$W204]);[$JSON.$Q$1];[.$Y204];[$JSON.$R$1];IF([.$Z204];&quot;true&quot;;&quot;false&quot;);[$JSON.$S$1];[.$A204];[$JSON.$T$1];[.$B204];[$JSON.$U$1])" office:value-type="string" office:string-value="{&quot;id&quot;:&quot;2-71&quot;,&quot;name&quot;:&quot;シャトルーズ&quot;,&quot;displayName&quot;:&quot;シャトルーズ&quot;,&quot;kana&quot;:&quot;しゃとるーず&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rarity&quot;:1,&quot;type&quot;:3,&quot;level&quot;:3,&quot;color&quot;:8,&quot;term&quot;:144,&quot;trait&quot;:0,&quot;power&quot;:null,&quot;legacy&quot;:2,&quot;anyNumCopies&quot;:false,&quot;orderTable&quot;:203,&quot;orderDeck&quot;:399}," calcext:value-type="string">
            <text:p>{"id":"2-71","name":"シャトルーズ","displayName":"シャトルーズ","kana":"しゃとるーず","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rarity":1,"type":3,"level":3,"color":8,"term":144,"trait":0,"power":null,"legacy":2,"anyNumCopies":false,"orderTable":203,"orderDeck":399},</text:p>
          </table:table-cell>
          <table:table-cell table:number-columns-repeated="16356"/>
        </table:table-row>
        <table:table-row table:style-name="ro2">
          <table:table-cell table:style-name="ce11" office:value-type="float" office:value="204" calcext:value-type="float">
            <text:p>204</text:p>
          </table:table-cell>
          <table:table-cell table:style-name="ce11" office:value-type="float" office:value="457" calcext:value-type="float">
            <text:p>457</text:p>
          </table:table-cell>
          <table:table-cell table:style-name="ce21" office:value-type="string" calcext:value-type="string">
            <text:p>2-72</text:p>
          </table:table-cell>
          <table:table-cell table:style-name="ce21" office:value-type="float" office:value="72" calcext:value-type="float">
            <text:p>72</text:p>
          </table:table-cell>
          <table:table-cell table:style-name="ce11" office:value-type="string" calcext:value-type="string">
            <text:p>サンドグラス</text:p>
          </table:table-cell>
          <table:table-cell table:style-name="ce11" table:formula="of:=[.E205]" office:value-type="string" office:string-value="サンドグラス" calcext:value-type="string">
            <text:p>サンドグラス</text:p>
          </table:table-cell>
          <table:table-cell table:style-name="ce11" office:value-type="string" calcext:value-type="string">
            <text:p>さんどぐらす</text:p>
          </table:table-cell>
          <table:table-cell table:style-name="ce11" office:value-type="string" calcext:value-type="string">
            <text:p>第２弾ブースターパック</text:p>
          </table:table-cell>
          <table:table-cell table:style-name="ce11" table:formula="of:=VLOOKUP([.H205];[$収録番号.$A$1:$収録番号.$B$10];2;0)" office:value-type="float" office:value="25" calcext:value-type="float">
            <text:p>25</text:p>
          </table:table-cell>
          <table:table-cell table:style-name="ce11" office:value-type="string" calcext:value-type="string">
            <text:p>N</text:p>
          </table:table-cell>
          <table:table-cell table:style-name="ce11" table:formula="of:=VLOOKUP([.J20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5];[$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5];[$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05];[$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0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2.png</text:p>
          </table:table-cell>
          <table:table-cell table:style-name="ce11" table:formula="of:=CONCATENATE([$JSON.$A$1];[.$C205];[$JSON.$B$1];[.$E205];[$JSON.$C$1];[.F205];[$JSON.$D$1];[.$G205];[$JSON.$E$1];IF(ISNA([.$T205]);&quot;null&quot;;&quot;&quot;&quot;&quot;&amp;[.$T205]&amp;&quot;&quot;&quot;&quot;);[$JSON.$F$1];[.$V205];[$JSON.$G$1];IF(ISNA([.$X205]);&quot;null&quot;;&quot;&quot;&quot;&quot;&amp;[.$X205]&amp;&quot;&quot;&quot;&quot;);[$JSON.$H$1];[.$AA205];[$JSON.$I$1];[.$I205];[$JSON.$J$1];[.K205];[$JSON.$K$1];[.$M205];[$JSON.$L$1];[.$P205];[$JSON.$M$1];[.$O205];[$JSON.$N$1];[.$S205];[$JSON.$O$1];[.$U205];[$JSON.$P$1];IF(ISNA([.$W205]);&quot;null&quot;;[.$W205]);[$JSON.$Q$1];[.$Y205];[$JSON.$R$1];IF([.$Z205];&quot;true&quot;;&quot;false&quot;);[$JSON.$S$1];[.$A205];[$JSON.$T$1];[.$B205];[$JSON.$U$1])" office:value-type="string" office:string-value="{&quot;id&quot;:&quot;2-72&quot;,&quot;name&quot;:&quot;サンドグラス&quot;,&quot;displayName&quot;:&quot;サンドグラス&quot;,&quot;kana&quot;:&quot;さんどぐらす&quot;,&quot;traitText&quot;:null,&quot;ruleText&quot;:&quot;魔力ゾーンに置かれたとき、1ドローする。&quot;,&quot;legacyText&quot;:null,&quot;imageUrl&quot;:&quot;https://one-draw.jp/ijinden/cardlist/002/card/02_072.png&quot;,&quot;expansion&quot;:25,&quot;rarity&quot;:1,&quot;type&quot;:4,&quot;level&quot;:1,&quot;color&quot;:8,&quot;term&quot;:0,&quot;trait&quot;:0,&quot;power&quot;:null,&quot;legacy&quot;:0,&quot;anyNumCopies&quot;:false,&quot;orderTable&quot;:204,&quot;orderDeck&quot;:457}," calcext:value-type="string">
            <text:p>{"id":"2-72","name":"サンドグラス","displayName":"サンドグラス","kana":"さんどぐらす","traitText":null,"ruleText":"魔力ゾーンに置かれたとき、1ドローする。","legacyText":null,"imageUrl":"https://one-draw.jp/ijinden/cardlist/002/card/02_072.png","expansion":25,"rarity":1,"type":4,"level":1,"color":8,"term":0,"trait":0,"power":null,"legacy":0,"anyNumCopies":false,"orderTable":204,"orderDeck":457},</text:p>
          </table:table-cell>
          <table:table-cell table:number-columns-repeated="16356"/>
        </table:table-row>
        <table:table-row table:style-name="ro2">
          <table:table-cell table:style-name="ce11" office:value-type="float" office:value="205" calcext:value-type="float">
            <text:p>205</text:p>
          </table:table-cell>
          <table:table-cell table:style-name="ce11" office:value-type="float" office:value="458" calcext:value-type="float">
            <text:p>458</text:p>
          </table:table-cell>
          <table:table-cell table:style-name="ce21" office:value-type="string" calcext:value-type="string">
            <text:p>2-73</text:p>
          </table:table-cell>
          <table:table-cell table:style-name="ce21" office:value-type="float" office:value="73" calcext:value-type="float">
            <text:p>73</text:p>
          </table:table-cell>
          <table:table-cell table:style-name="ce11" office:value-type="string" calcext:value-type="string">
            <text:p>シルククローク</text:p>
          </table:table-cell>
          <table:table-cell table:style-name="ce11" table:formula="of:=[.E206]" office:value-type="string" office:string-value="シルククローク" calcext:value-type="string">
            <text:p>シルククローク</text:p>
          </table:table-cell>
          <table:table-cell table:style-name="ce11" office:value-type="string" calcext:value-type="string">
            <text:p>しるくくろーく</text:p>
          </table:table-cell>
          <table:table-cell table:style-name="ce11" office:value-type="string" calcext:value-type="string">
            <text:p>第２弾ブースターパック</text:p>
          </table:table-cell>
          <table:table-cell table:style-name="ce11" table:formula="of:=VLOOKUP([.H206];[$収録番号.$A$1:$収録番号.$B$10];2;0)" office:value-type="float" office:value="25" calcext:value-type="float">
            <text:p>25</text:p>
          </table:table-cell>
          <table:table-cell table:style-name="ce11" office:value-type="string" calcext:value-type="string">
            <text:p>N</text:p>
          </table:table-cell>
          <table:table-cell table:style-name="ce11" table:formula="of:=VLOOKUP([.J2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6];[$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6];[$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06];[$特性番号.$A$1:$特性番号.$B$8];2;0);0)" office:value-type="float" office:value="0" calcext:value-type="float">
            <text:p>0</text:p>
          </table:table-cell>
          <table:table-cell table:style-name="ce11"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6];[$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3.png</text:p>
          </table:table-cell>
          <table:table-cell table:style-name="ce11" table:formula="of:=CONCATENATE([$JSON.$A$1];[.$C206];[$JSON.$B$1];[.$E206];[$JSON.$C$1];[.F206];[$JSON.$D$1];[.$G206];[$JSON.$E$1];IF(ISNA([.$T206]);&quot;null&quot;;&quot;&quot;&quot;&quot;&amp;[.$T206]&amp;&quot;&quot;&quot;&quot;);[$JSON.$F$1];[.$V206];[$JSON.$G$1];IF(ISNA([.$X206]);&quot;null&quot;;&quot;&quot;&quot;&quot;&amp;[.$X206]&amp;&quot;&quot;&quot;&quot;);[$JSON.$H$1];[.$AA206];[$JSON.$I$1];[.$I206];[$JSON.$J$1];[.K206];[$JSON.$K$1];[.$M206];[$JSON.$L$1];[.$P206];[$JSON.$M$1];[.$O206];[$JSON.$N$1];[.$S206];[$JSON.$O$1];[.$U206];[$JSON.$P$1];IF(ISNA([.$W206]);&quot;null&quot;;[.$W206]);[$JSON.$Q$1];[.$Y206];[$JSON.$R$1];IF([.$Z206];&quot;true&quot;;&quot;false&quot;);[$JSON.$S$1];[.$A206];[$JSON.$T$1];[.$B206];[$JSON.$U$1])" office:value-type="string" office:string-value="{&quot;id&quot;:&quot;2-73&quot;,&quot;name&quot;:&quot;シルククローク&quot;,&quot;displayName&quot;:&quot;シルククローク&quot;,&quot;kana&quot;:&quot;しるくくろーく&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rarity&quot;:1,&quot;type&quot;:4,&quot;level&quot;:1,&quot;color&quot;:8,&quot;term&quot;:0,&quot;trait&quot;:0,&quot;power&quot;:null,&quot;legacy&quot;:3,&quot;anyNumCopies&quot;:false,&quot;orderTable&quot;:205,&quot;orderDeck&quot;:458}," calcext:value-type="string">
            <text:p>{"id":"2-73","name":"シルククローク","displayName":"シルククローク","kana":"しるくくろーく","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rarity":1,"type":4,"level":1,"color":8,"term":0,"trait":0,"power":null,"legacy":3,"anyNumCopies":false,"orderTable":205,"orderDeck":458},</text:p>
          </table:table-cell>
          <table:table-cell table:number-columns-repeated="16356"/>
        </table:table-row>
        <table:table-row table:style-name="ro2">
          <table:table-cell table:style-name="ce11" office:value-type="float" office:value="206" calcext:value-type="float">
            <text:p>206</text:p>
          </table:table-cell>
          <table:table-cell table:style-name="ce11" office:value-type="float" office:value="484" calcext:value-type="float">
            <text:p>484</text:p>
          </table:table-cell>
          <table:table-cell table:style-name="ce21" office:value-type="string" calcext:value-type="string">
            <text:p>2-74</text:p>
          </table:table-cell>
          <table:table-cell table:style-name="ce21" office:value-type="float" office:value="74" calcext:value-type="float">
            <text:p>74</text:p>
          </table:table-cell>
          <table:table-cell table:style-name="ce11" office:value-type="string" calcext:value-type="string">
            <text:p>イエローオーブ</text:p>
          </table:table-cell>
          <table:table-cell table:style-name="ce11" office:value-type="string" calcext:value-type="string">
            <text:p>イエローオーブ (第2弾)</text:p>
          </table:table-cell>
          <table:table-cell table:style-name="ce11" office:value-type="string" calcext:value-type="string">
            <text:p>いえろーおーぶ</text:p>
          </table:table-cell>
          <table:table-cell table:style-name="ce11" office:value-type="string" calcext:value-type="string">
            <text:p>第２弾ブースターパック</text:p>
          </table:table-cell>
          <table:table-cell table:style-name="ce11" table:formula="of:=VLOOKUP([.H207];[$収録番号.$A$1:$収録番号.$B$10];2;0)" office:value-type="float" office:value="25" calcext:value-type="float">
            <text:p>25</text:p>
          </table:table-cell>
          <table:table-cell table:style-name="ce11" office:value-type="string" calcext:value-type="string">
            <text:p>R</text:p>
          </table:table-cell>
          <table:table-cell table:style-name="ce11" table:formula="of:=VLOOKUP([.J207];[$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07];[$種類番号.$A$1:$種類番号.$B$4];2;0)" office:value-type="float" office:value="4" calcext:value-type="float">
            <text:p>4</text:p>
          </table:table-cell>
          <table:table-cell table:style-name="ce11" office:value-type="string" calcext:value-type="string">
            <text:p>黄</text:p>
          </table:table-cell>
          <table:table-cell table:style-name="ce11" table:formula="of:=VLOOKUP([.N207];[$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07];[$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7];[$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4.png</text:p>
          </table:table-cell>
          <table:table-cell table:style-name="ce11" table:formula="of:=CONCATENATE([$JSON.$A$1];[.$C207];[$JSON.$B$1];[.$E207];[$JSON.$C$1];[.F207];[$JSON.$D$1];[.$G207];[$JSON.$E$1];IF(ISNA([.$T207]);&quot;null&quot;;&quot;&quot;&quot;&quot;&amp;[.$T207]&amp;&quot;&quot;&quot;&quot;);[$JSON.$F$1];[.$V207];[$JSON.$G$1];IF(ISNA([.$X207]);&quot;null&quot;;&quot;&quot;&quot;&quot;&amp;[.$X207]&amp;&quot;&quot;&quot;&quot;);[$JSON.$H$1];[.$AA207];[$JSON.$I$1];[.$I207];[$JSON.$J$1];[.K207];[$JSON.$K$1];[.$M207];[$JSON.$L$1];[.$P207];[$JSON.$M$1];[.$O207];[$JSON.$N$1];[.$S207];[$JSON.$O$1];[.$U207];[$JSON.$P$1];IF(ISNA([.$W207]);&quot;null&quot;;[.$W207]);[$JSON.$Q$1];[.$Y207];[$JSON.$R$1];IF([.$Z207];&quot;true&quot;;&quot;false&quot;);[$JSON.$S$1];[.$A207];[$JSON.$T$1];[.$B207];[$JSON.$U$1])" office:value-type="string" office:string-value="{&quot;id&quot;:&quot;2-74&quot;,&quot;name&quot;:&quot;イエローオーブ&quot;,&quot;displayName&quot;:&quot;イエローオーブ (第2弾)&quot;,&quot;kana&quot;:&quot;いえろーおーぶ&quot;,&quot;traitText&quot;:null,&quot;ruleText&quot;:&quot;&quot;,&quot;legacyText&quot;:&quot;復元&quot;,&quot;imageUrl&quot;:&quot;https://one-draw.jp/ijinden/cardlist/002/card/02_074.png&quot;,&quot;expansion&quot;:25,&quot;rarity&quot;:2,&quot;type&quot;:4,&quot;level&quot;:2,&quot;color&quot;:8,&quot;term&quot;:0,&quot;trait&quot;:0,&quot;power&quot;:null,&quot;legacy&quot;:3,&quot;anyNumCopies&quot;:false,&quot;orderTable&quot;:206,&quot;orderDeck&quot;:484}," calcext:value-type="string">
            <text:p>{"id":"2-74","name":"イエローオーブ","displayName":"イエローオーブ (第2弾)","kana":"いえろーおーぶ","traitText":null,"ruleText":"","legacyText":"復元","imageUrl":"https://one-draw.jp/ijinden/cardlist/002/card/02_074.png","expansion":25,"rarity":2,"type":4,"level":2,"color":8,"term":0,"trait":0,"power":null,"legacy":3,"anyNumCopies":false,"orderTable":206,"orderDeck":484},</text:p>
          </table:table-cell>
          <table:table-cell table:number-columns-repeated="16356"/>
        </table:table-row>
        <table:table-row table:style-name="ro2">
          <table:table-cell table:style-name="ce11" office:value-type="float" office:value="207" calcext:value-type="float">
            <text:p>207</text:p>
          </table:table-cell>
          <table:table-cell table:style-name="ce11" office:value-type="float" office:value="469" calcext:value-type="float">
            <text:p>469</text:p>
          </table:table-cell>
          <table:table-cell table:style-name="ce21" office:value-type="string" calcext:value-type="string">
            <text:p>2-75</text:p>
          </table:table-cell>
          <table:table-cell table:style-name="ce21" office:value-type="float" office:value="75" calcext:value-type="float">
            <text:p>75</text:p>
          </table:table-cell>
          <table:table-cell table:style-name="ce11" office:value-type="string" calcext:value-type="string">
            <text:p>RYマーブルストーン</text:p>
          </table:table-cell>
          <table:table-cell table:style-name="ce11" table:formula="of:=[.E208]" office:value-type="string" office:string-value="RYマーブルストーン" calcext:value-type="string">
            <text:p>RYマーブルストーン</text:p>
          </table:table-cell>
          <table:table-cell table:style-name="ce11" office:value-type="string" calcext:value-type="string">
            <text:p>ryまーぶるすとーん</text:p>
          </table:table-cell>
          <table:table-cell table:style-name="ce11" office:value-type="string" calcext:value-type="string">
            <text:p>第２弾ブースターパック</text:p>
          </table:table-cell>
          <table:table-cell table:style-name="ce11" table:formula="of:=VLOOKUP([.H208];[$収録番号.$A$1:$収録番号.$B$10];2;0)" office:value-type="float" office:value="25" calcext:value-type="float">
            <text:p>25</text:p>
          </table:table-cell>
          <table:table-cell table:style-name="ce11" office:value-type="string" calcext:value-type="string">
            <text:p>N</text:p>
          </table:table-cell>
          <table:table-cell table:style-name="ce11" table:formula="of:=VLOOKUP([.J2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8];[$種類番号.$A$1:$種類番号.$B$4];2;0)" office:value-type="float" office:value="4" calcext:value-type="float">
            <text:p>4</text:p>
          </table:table-cell>
          <table:table-cell table:style-name="ce11" office:value-type="string" calcext:value-type="string">
            <text:p>赤黄</text:p>
          </table:table-cell>
          <table:table-cell table:style-name="ce11" table:formula="of:=VLOOKUP([.N208];[$色番号.$A$1:$色番号.$B$10];2;0)" office:value-type="float" office:value="41" calcext:value-type="float">
            <text:p>4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08];[$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5.png</text:p>
          </table:table-cell>
          <table:table-cell table:style-name="ce11" table:formula="of:=CONCATENATE([$JSON.$A$1];[.$C208];[$JSON.$B$1];[.$E208];[$JSON.$C$1];[.F208];[$JSON.$D$1];[.$G208];[$JSON.$E$1];IF(ISNA([.$T208]);&quot;null&quot;;&quot;&quot;&quot;&quot;&amp;[.$T208]&amp;&quot;&quot;&quot;&quot;);[$JSON.$F$1];[.$V208];[$JSON.$G$1];IF(ISNA([.$X208]);&quot;null&quot;;&quot;&quot;&quot;&quot;&amp;[.$X208]&amp;&quot;&quot;&quot;&quot;);[$JSON.$H$1];[.$AA208];[$JSON.$I$1];[.$I208];[$JSON.$J$1];[.K208];[$JSON.$K$1];[.$M208];[$JSON.$L$1];[.$P208];[$JSON.$M$1];[.$O208];[$JSON.$N$1];[.$S208];[$JSON.$O$1];[.$U208];[$JSON.$P$1];IF(ISNA([.$W208]);&quot;null&quot;;[.$W208]);[$JSON.$Q$1];[.$Y208];[$JSON.$R$1];IF([.$Z208];&quot;true&quot;;&quot;false&quot;);[$JSON.$S$1];[.$A208];[$JSON.$T$1];[.$B208];[$JSON.$U$1])" office:value-type="string" office:string-value="{&quot;id&quot;:&quot;2-75&quot;,&quot;name&quot;:&quot;RYマーブルストーン&quot;,&quot;displayName&quot;:&quot;RYマーブルストーン&quot;,&quot;kana&quot;:&quot;ryまーぶるすとーん&quot;,&quot;traitText&quot;:null,&quot;ruleText&quot;:&quot;&quot;,&quot;legacyText&quot;:&quot;復元&quot;,&quot;imageUrl&quot;:&quot;https://one-draw.jp/ijinden/cardlist/002/card/02_075.png&quot;,&quot;expansion&quot;:25,&quot;rarity&quot;:1,&quot;type&quot;:4,&quot;level&quot;:1,&quot;color&quot;:41,&quot;term&quot;:0,&quot;trait&quot;:0,&quot;power&quot;:null,&quot;legacy&quot;:3,&quot;anyNumCopies&quot;:false,&quot;orderTable&quot;:207,&quot;orderDeck&quot;:469}," calcext:value-type="string">
            <text:p>{"id":"2-75","name":"RYマーブルストーン","displayName":"RYマーブルストーン","kana":"ryまーぶるすとーん","traitText":null,"ruleText":"","legacyText":"復元","imageUrl":"https://one-draw.jp/ijinden/cardlist/002/card/02_075.png","expansion":25,"rarity":1,"type":4,"level":1,"color":41,"term":0,"trait":0,"power":null,"legacy":3,"anyNumCopies":false,"orderTable":207,"orderDeck":469},</text:p>
          </table:table-cell>
          <table:table-cell table:number-columns-repeated="16356"/>
        </table:table-row>
        <table:table-row table:style-name="ro2">
          <table:table-cell table:style-name="ce11" office:value-type="float" office:value="208" calcext:value-type="float">
            <text:p>208</text:p>
          </table:table-cell>
          <table:table-cell table:style-name="ce11" office:value-type="float" office:value="470" calcext:value-type="float">
            <text:p>470</text:p>
          </table:table-cell>
          <table:table-cell table:style-name="ce21" office:value-type="string" calcext:value-type="string">
            <text:p>2-76</text:p>
          </table:table-cell>
          <table:table-cell table:style-name="ce21" office:value-type="float" office:value="76" calcext:value-type="float">
            <text:p>76</text:p>
          </table:table-cell>
          <table:table-cell table:style-name="ce11" office:value-type="string" calcext:value-type="string">
            <text:p>BYマーブルストーン</text:p>
          </table:table-cell>
          <table:table-cell table:style-name="ce11" table:formula="of:=[.E209]" office:value-type="string" office:string-value="BYマーブルストーン" calcext:value-type="string">
            <text:p>BYマーブルストーン</text:p>
          </table:table-cell>
          <table:table-cell table:style-name="ce11" office:value-type="string" calcext:value-type="string">
            <text:p>byまーぶるすとーん</text:p>
          </table:table-cell>
          <table:table-cell table:style-name="ce11" office:value-type="string" calcext:value-type="string">
            <text:p>第２弾ブースターパック</text:p>
          </table:table-cell>
          <table:table-cell table:style-name="ce11" table:formula="of:=VLOOKUP([.H209];[$収録番号.$A$1:$収録番号.$B$10];2;0)" office:value-type="float" office:value="25" calcext:value-type="float">
            <text:p>25</text:p>
          </table:table-cell>
          <table:table-cell table:style-name="ce11" office:value-type="string" calcext:value-type="string">
            <text:p>N</text:p>
          </table:table-cell>
          <table:table-cell table:style-name="ce11" table:formula="of:=VLOOKUP([.J20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09];[$種類番号.$A$1:$種類番号.$B$4];2;0)" office:value-type="float" office:value="4" calcext:value-type="float">
            <text:p>4</text:p>
          </table:table-cell>
          <table:table-cell table:style-name="ce11" office:value-type="string" calcext:value-type="string">
            <text:p>青黄</text:p>
          </table:table-cell>
          <table:table-cell table:style-name="ce11" table:formula="of:=VLOOKUP([.N209];[$色番号.$A$1:$色番号.$B$10];2;0)" office:value-type="float" office:value="42" calcext:value-type="float">
            <text:p>4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0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09];[$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6.png</text:p>
          </table:table-cell>
          <table:table-cell table:style-name="ce11" table:formula="of:=CONCATENATE([$JSON.$A$1];[.$C209];[$JSON.$B$1];[.$E209];[$JSON.$C$1];[.F209];[$JSON.$D$1];[.$G209];[$JSON.$E$1];IF(ISNA([.$T209]);&quot;null&quot;;&quot;&quot;&quot;&quot;&amp;[.$T209]&amp;&quot;&quot;&quot;&quot;);[$JSON.$F$1];[.$V209];[$JSON.$G$1];IF(ISNA([.$X209]);&quot;null&quot;;&quot;&quot;&quot;&quot;&amp;[.$X209]&amp;&quot;&quot;&quot;&quot;);[$JSON.$H$1];[.$AA209];[$JSON.$I$1];[.$I209];[$JSON.$J$1];[.K209];[$JSON.$K$1];[.$M209];[$JSON.$L$1];[.$P209];[$JSON.$M$1];[.$O209];[$JSON.$N$1];[.$S209];[$JSON.$O$1];[.$U209];[$JSON.$P$1];IF(ISNA([.$W209]);&quot;null&quot;;[.$W209]);[$JSON.$Q$1];[.$Y209];[$JSON.$R$1];IF([.$Z209];&quot;true&quot;;&quot;false&quot;);[$JSON.$S$1];[.$A209];[$JSON.$T$1];[.$B209];[$JSON.$U$1])" office:value-type="string" office:string-value="{&quot;id&quot;:&quot;2-76&quot;,&quot;name&quot;:&quot;BYマーブルストーン&quot;,&quot;displayName&quot;:&quot;BYマーブルストーン&quot;,&quot;kana&quot;:&quot;byまーぶるすとーん&quot;,&quot;traitText&quot;:null,&quot;ruleText&quot;:&quot;&quot;,&quot;legacyText&quot;:&quot;復元&quot;,&quot;imageUrl&quot;:&quot;https://one-draw.jp/ijinden/cardlist/002/card/02_076.png&quot;,&quot;expansion&quot;:25,&quot;rarity&quot;:1,&quot;type&quot;:4,&quot;level&quot;:1,&quot;color&quot;:42,&quot;term&quot;:0,&quot;trait&quot;:0,&quot;power&quot;:null,&quot;legacy&quot;:3,&quot;anyNumCopies&quot;:false,&quot;orderTable&quot;:208,&quot;orderDeck&quot;:470}," calcext:value-type="string">
            <text:p>{"id":"2-76","name":"BYマーブルストーン","displayName":"BYマーブルストーン","kana":"byまーぶるすとーん","traitText":null,"ruleText":"","legacyText":"復元","imageUrl":"https://one-draw.jp/ijinden/cardlist/002/card/02_076.png","expansion":25,"rarity":1,"type":4,"level":1,"color":42,"term":0,"trait":0,"power":null,"legacy":3,"anyNumCopies":false,"orderTable":208,"orderDeck":470},</text:p>
          </table:table-cell>
          <table:table-cell table:number-columns-repeated="16356"/>
        </table:table-row>
        <table:table-row table:style-name="ro2">
          <table:table-cell table:style-name="ce11" office:value-type="float" office:value="209" calcext:value-type="float">
            <text:p>209</text:p>
          </table:table-cell>
          <table:table-cell table:style-name="ce11" office:value-type="float" office:value="471" calcext:value-type="float">
            <text:p>471</text:p>
          </table:table-cell>
          <table:table-cell table:style-name="ce21" office:value-type="string" calcext:value-type="string">
            <text:p>2-77</text:p>
          </table:table-cell>
          <table:table-cell table:style-name="ce21" office:value-type="float" office:value="77" calcext:value-type="float">
            <text:p>77</text:p>
          </table:table-cell>
          <table:table-cell table:style-name="ce11" office:value-type="string" calcext:value-type="string">
            <text:p>GYマーブルストーン</text:p>
          </table:table-cell>
          <table:table-cell table:style-name="ce11" table:formula="of:=[.E210]" office:value-type="string" office:string-value="GYマーブルストーン" calcext:value-type="string">
            <text:p>GYマーブルストーン</text:p>
          </table:table-cell>
          <table:table-cell table:style-name="ce11" office:value-type="string" calcext:value-type="string">
            <text:p>gyまーぶるすとーん</text:p>
          </table:table-cell>
          <table:table-cell table:style-name="ce11" office:value-type="string" calcext:value-type="string">
            <text:p>第２弾ブースターパック</text:p>
          </table:table-cell>
          <table:table-cell table:style-name="ce11" table:formula="of:=VLOOKUP([.H210];[$収録番号.$A$1:$収録番号.$B$10];2;0)" office:value-type="float" office:value="25" calcext:value-type="float">
            <text:p>25</text:p>
          </table:table-cell>
          <table:table-cell table:style-name="ce11" office:value-type="string" calcext:value-type="string">
            <text:p>N</text:p>
          </table:table-cell>
          <table:table-cell table:style-name="ce11" table:formula="of:=VLOOKUP([.J21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10];[$種類番号.$A$1:$種類番号.$B$4];2;0)" office:value-type="float" office:value="4" calcext:value-type="float">
            <text:p>4</text:p>
          </table:table-cell>
          <table:table-cell table:style-name="ce11" office:value-type="string" calcext:value-type="string">
            <text:p>緑黄</text:p>
          </table:table-cell>
          <table:table-cell table:style-name="ce11" table:formula="of:=VLOOKUP([.N210];[$色番号.$A$1:$色番号.$B$10];2;0)" office:value-type="float" office:value="44" calcext:value-type="float">
            <text:p>4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10];[$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0];[$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7.png</text:p>
          </table:table-cell>
          <table:table-cell table:style-name="ce11" table:formula="of:=CONCATENATE([$JSON.$A$1];[.$C210];[$JSON.$B$1];[.$E210];[$JSON.$C$1];[.F210];[$JSON.$D$1];[.$G210];[$JSON.$E$1];IF(ISNA([.$T210]);&quot;null&quot;;&quot;&quot;&quot;&quot;&amp;[.$T210]&amp;&quot;&quot;&quot;&quot;);[$JSON.$F$1];[.$V210];[$JSON.$G$1];IF(ISNA([.$X210]);&quot;null&quot;;&quot;&quot;&quot;&quot;&amp;[.$X210]&amp;&quot;&quot;&quot;&quot;);[$JSON.$H$1];[.$AA210];[$JSON.$I$1];[.$I210];[$JSON.$J$1];[.K210];[$JSON.$K$1];[.$M210];[$JSON.$L$1];[.$P210];[$JSON.$M$1];[.$O210];[$JSON.$N$1];[.$S210];[$JSON.$O$1];[.$U210];[$JSON.$P$1];IF(ISNA([.$W210]);&quot;null&quot;;[.$W210]);[$JSON.$Q$1];[.$Y210];[$JSON.$R$1];IF([.$Z210];&quot;true&quot;;&quot;false&quot;);[$JSON.$S$1];[.$A210];[$JSON.$T$1];[.$B210];[$JSON.$U$1])" office:value-type="string" office:string-value="{&quot;id&quot;:&quot;2-77&quot;,&quot;name&quot;:&quot;GYマーブルストーン&quot;,&quot;displayName&quot;:&quot;GYマーブルストーン&quot;,&quot;kana&quot;:&quot;gyまーぶるすとーん&quot;,&quot;traitText&quot;:null,&quot;ruleText&quot;:&quot;&quot;,&quot;legacyText&quot;:&quot;復元&quot;,&quot;imageUrl&quot;:&quot;https://one-draw.jp/ijinden/cardlist/002/card/02_077.png&quot;,&quot;expansion&quot;:25,&quot;rarity&quot;:1,&quot;type&quot;:4,&quot;level&quot;:1,&quot;color&quot;:44,&quot;term&quot;:0,&quot;trait&quot;:0,&quot;power&quot;:null,&quot;legacy&quot;:3,&quot;anyNumCopies&quot;:false,&quot;orderTable&quot;:209,&quot;orderDeck&quot;:471}," calcext:value-type="string">
            <text:p>{"id":"2-77","name":"GYマーブルストーン","displayName":"GYマーブルストーン","kana":"gyまーぶるすとーん","traitText":null,"ruleText":"","legacyText":"復元","imageUrl":"https://one-draw.jp/ijinden/cardlist/002/card/02_077.png","expansion":25,"rarity":1,"type":4,"level":1,"color":44,"term":0,"trait":0,"power":null,"legacy":3,"anyNumCopies":false,"orderTable":209,"orderDeck":471},</text:p>
          </table:table-cell>
          <table:table-cell table:number-columns-repeated="16356"/>
        </table:table-row>
        <table:table-row table:style-name="ro2">
          <table:table-cell table:style-name="ce11" office:value-type="float" office:value="210" calcext:value-type="float">
            <text:p>210</text:p>
          </table:table-cell>
          <table:table-cell table:style-name="ce11" office:value-type="float" office:value="488" calcext:value-type="float">
            <text:p>488</text:p>
          </table:table-cell>
          <table:table-cell table:style-name="ce21" office:value-type="string" calcext:value-type="string">
            <text:p>2-78</text:p>
          </table:table-cell>
          <table:table-cell table:style-name="ce21" office:value-type="float" office:value="78" calcext:value-type="float">
            <text:p>78</text:p>
          </table:table-cell>
          <table:table-cell table:style-name="ce11" office:value-type="string" calcext:value-type="string">
            <text:p>RYマーブルオーブ</text:p>
          </table:table-cell>
          <table:table-cell table:style-name="ce11" table:formula="of:=[.E211]" office:value-type="string" office:string-value="RYマーブルオーブ" calcext:value-type="string">
            <text:p>RYマーブルオーブ</text:p>
          </table:table-cell>
          <table:table-cell table:style-name="ce11" office:value-type="string" calcext:value-type="string">
            <text:p>ryまーぶるおーぶ</text:p>
          </table:table-cell>
          <table:table-cell table:style-name="ce11" office:value-type="string" calcext:value-type="string">
            <text:p>第２弾ブースターパック</text:p>
          </table:table-cell>
          <table:table-cell table:style-name="ce11" table:formula="of:=VLOOKUP([.H211];[$収録番号.$A$1:$収録番号.$B$10];2;0)" office:value-type="float" office:value="25" calcext:value-type="float">
            <text:p>25</text:p>
          </table:table-cell>
          <table:table-cell table:style-name="ce11" office:value-type="string" calcext:value-type="string">
            <text:p>R</text:p>
          </table:table-cell>
          <table:table-cell table:style-name="ce11" table:formula="of:=VLOOKUP([.J211];[$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1];[$種類番号.$A$1:$種類番号.$B$4];2;0)" office:value-type="float" office:value="4" calcext:value-type="float">
            <text:p>4</text:p>
          </table:table-cell>
          <table:table-cell table:style-name="ce11" office:value-type="string" calcext:value-type="string">
            <text:p>赤黄</text:p>
          </table:table-cell>
          <table:table-cell table:style-name="ce11" table:formula="of:=VLOOKUP([.N211];[$色番号.$A$1:$色番号.$B$10];2;0)" office:value-type="float" office:value="41" calcext:value-type="float">
            <text:p>4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11];[$特性番号.$A$1:$特性番号.$B$8];2;0);0)" office:value-type="float" office:value="0" calcext:value-type="float">
            <text:p>0</text:p>
          </table:table-cell>
          <table:table-cell table:style-name="ce11" office:value-type="string" calcext:value-type="string">
            <text:p>魔力ゾーンに置かれたとき、赤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1];[$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8.png</text:p>
          </table:table-cell>
          <table:table-cell table:style-name="ce11" table:formula="of:=CONCATENATE([$JSON.$A$1];[.$C211];[$JSON.$B$1];[.$E211];[$JSON.$C$1];[.F211];[$JSON.$D$1];[.$G211];[$JSON.$E$1];IF(ISNA([.$T211]);&quot;null&quot;;&quot;&quot;&quot;&quot;&amp;[.$T211]&amp;&quot;&quot;&quot;&quot;);[$JSON.$F$1];[.$V211];[$JSON.$G$1];IF(ISNA([.$X211]);&quot;null&quot;;&quot;&quot;&quot;&quot;&amp;[.$X211]&amp;&quot;&quot;&quot;&quot;);[$JSON.$H$1];[.$AA211];[$JSON.$I$1];[.$I211];[$JSON.$J$1];[.K211];[$JSON.$K$1];[.$M211];[$JSON.$L$1];[.$P211];[$JSON.$M$1];[.$O211];[$JSON.$N$1];[.$S211];[$JSON.$O$1];[.$U211];[$JSON.$P$1];IF(ISNA([.$W211]);&quot;null&quot;;[.$W211]);[$JSON.$Q$1];[.$Y211];[$JSON.$R$1];IF([.$Z211];&quot;true&quot;;&quot;false&quot;);[$JSON.$S$1];[.$A211];[$JSON.$T$1];[.$B211];[$JSON.$U$1])" office:value-type="string" office:string-value="{&quot;id&quot;:&quot;2-78&quot;,&quot;name&quot;:&quot;RYマーブルオーブ&quot;,&quot;displayName&quot;:&quot;RYマーブルオーブ&quot;,&quot;kana&quot;:&quot;ryまーぶるおーぶ&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rarity&quot;:2,&quot;type&quot;:4,&quot;level&quot;:2,&quot;color&quot;:41,&quot;term&quot;:0,&quot;trait&quot;:0,&quot;power&quot;:null,&quot;legacy&quot;:3,&quot;anyNumCopies&quot;:false,&quot;orderTable&quot;:210,&quot;orderDeck&quot;:488}," calcext:value-type="string">
            <text:p>{"id":"2-78","name":"RYマーブルオーブ","displayName":"RYマーブルオーブ","kana":"ryまーぶるおーぶ","traitText":null,"ruleText":"魔力ゾーンに置かれたとき、赤か黄の他のマリョクが自分の魔力ゾーンにないなら、自分の戦場のガーディアン1体を山札の上に戻す。","legacyText":"復元","imageUrl":"https://one-draw.jp/ijinden/cardlist/002/card/02_078.png","expansion":25,"rarity":2,"type":4,"level":2,"color":41,"term":0,"trait":0,"power":null,"legacy":3,"anyNumCopies":false,"orderTable":210,"orderDeck":488},</text:p>
          </table:table-cell>
          <table:table-cell table:number-columns-repeated="16356"/>
        </table:table-row>
        <table:table-row table:style-name="ro2">
          <table:table-cell table:style-name="ce11" office:value-type="float" office:value="211" calcext:value-type="float">
            <text:p>211</text:p>
          </table:table-cell>
          <table:table-cell table:style-name="ce11" office:value-type="float" office:value="489" calcext:value-type="float">
            <text:p>489</text:p>
          </table:table-cell>
          <table:table-cell table:style-name="ce21" office:value-type="string" calcext:value-type="string">
            <text:p>2-79</text:p>
          </table:table-cell>
          <table:table-cell table:style-name="ce21" office:value-type="float" office:value="79" calcext:value-type="float">
            <text:p>79</text:p>
          </table:table-cell>
          <table:table-cell table:style-name="ce11" office:value-type="string" calcext:value-type="string">
            <text:p>BYマーブルオーブ</text:p>
          </table:table-cell>
          <table:table-cell table:style-name="ce11" table:formula="of:=[.E212]" office:value-type="string" office:string-value="BYマーブルオーブ" calcext:value-type="string">
            <text:p>BYマーブルオーブ</text:p>
          </table:table-cell>
          <table:table-cell table:style-name="ce11" office:value-type="string" calcext:value-type="string">
            <text:p>byまーぶるおーぶ</text:p>
          </table:table-cell>
          <table:table-cell table:style-name="ce11" office:value-type="string" calcext:value-type="string">
            <text:p>第２弾ブースターパック</text:p>
          </table:table-cell>
          <table:table-cell table:style-name="ce11" table:formula="of:=VLOOKUP([.H212];[$収録番号.$A$1:$収録番号.$B$10];2;0)" office:value-type="float" office:value="25" calcext:value-type="float">
            <text:p>25</text:p>
          </table:table-cell>
          <table:table-cell table:style-name="ce11" office:value-type="string" calcext:value-type="string">
            <text:p>R</text:p>
          </table:table-cell>
          <table:table-cell table:style-name="ce11" table:formula="of:=VLOOKUP([.J212];[$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2];[$種類番号.$A$1:$種類番号.$B$4];2;0)" office:value-type="float" office:value="4" calcext:value-type="float">
            <text:p>4</text:p>
          </table:table-cell>
          <table:table-cell table:style-name="ce11" office:value-type="string" calcext:value-type="string">
            <text:p>青黄</text:p>
          </table:table-cell>
          <table:table-cell table:style-name="ce11" table:formula="of:=VLOOKUP([.N212];[$色番号.$A$1:$色番号.$B$10];2;0)" office:value-type="float" office:value="42" calcext:value-type="float">
            <text:p>4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12];[$特性番号.$A$1:$特性番号.$B$8];2;0);0)" office:value-type="float" office:value="0" calcext:value-type="float">
            <text:p>0</text:p>
          </table:table-cell>
          <table:table-cell table:style-name="ce11" office:value-type="string" calcext:value-type="string">
            <text:p>魔力ゾーンに置かれたとき、青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2];[$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79.png</text:p>
          </table:table-cell>
          <table:table-cell table:style-name="ce11" table:formula="of:=CONCATENATE([$JSON.$A$1];[.$C212];[$JSON.$B$1];[.$E212];[$JSON.$C$1];[.F212];[$JSON.$D$1];[.$G212];[$JSON.$E$1];IF(ISNA([.$T212]);&quot;null&quot;;&quot;&quot;&quot;&quot;&amp;[.$T212]&amp;&quot;&quot;&quot;&quot;);[$JSON.$F$1];[.$V212];[$JSON.$G$1];IF(ISNA([.$X212]);&quot;null&quot;;&quot;&quot;&quot;&quot;&amp;[.$X212]&amp;&quot;&quot;&quot;&quot;);[$JSON.$H$1];[.$AA212];[$JSON.$I$1];[.$I212];[$JSON.$J$1];[.K212];[$JSON.$K$1];[.$M212];[$JSON.$L$1];[.$P212];[$JSON.$M$1];[.$O212];[$JSON.$N$1];[.$S212];[$JSON.$O$1];[.$U212];[$JSON.$P$1];IF(ISNA([.$W212]);&quot;null&quot;;[.$W212]);[$JSON.$Q$1];[.$Y212];[$JSON.$R$1];IF([.$Z212];&quot;true&quot;;&quot;false&quot;);[$JSON.$S$1];[.$A212];[$JSON.$T$1];[.$B212];[$JSON.$U$1])" office:value-type="string" office:string-value="{&quot;id&quot;:&quot;2-79&quot;,&quot;name&quot;:&quot;BYマーブルオーブ&quot;,&quot;displayName&quot;:&quot;BYマーブルオーブ&quot;,&quot;kana&quot;:&quot;byまーぶるおーぶ&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rarity&quot;:2,&quot;type&quot;:4,&quot;level&quot;:2,&quot;color&quot;:42,&quot;term&quot;:0,&quot;trait&quot;:0,&quot;power&quot;:null,&quot;legacy&quot;:3,&quot;anyNumCopies&quot;:false,&quot;orderTable&quot;:211,&quot;orderDeck&quot;:489}," calcext:value-type="string">
            <text:p>{"id":"2-79","name":"BYマーブルオーブ","displayName":"BYマーブルオーブ","kana":"byまーぶるおーぶ","traitText":null,"ruleText":"魔力ゾーンに置かれたとき、青か黄の他のマリョクが自分の魔力ゾーンにないなら、自分の戦場のガーディアン1体を山札の上に戻す。","legacyText":"復元","imageUrl":"https://one-draw.jp/ijinden/cardlist/002/card/02_079.png","expansion":25,"rarity":2,"type":4,"level":2,"color":42,"term":0,"trait":0,"power":null,"legacy":3,"anyNumCopies":false,"orderTable":211,"orderDeck":489},</text:p>
          </table:table-cell>
          <table:table-cell table:number-columns-repeated="16356"/>
        </table:table-row>
        <table:table-row table:style-name="ro2">
          <table:table-cell table:style-name="ce11" office:value-type="float" office:value="212" calcext:value-type="float">
            <text:p>212</text:p>
          </table:table-cell>
          <table:table-cell table:style-name="ce11" office:value-type="float" office:value="490" calcext:value-type="float">
            <text:p>490</text:p>
          </table:table-cell>
          <table:table-cell table:style-name="ce21" office:value-type="string" calcext:value-type="string">
            <text:p>2-80</text:p>
          </table:table-cell>
          <table:table-cell table:style-name="ce21" office:value-type="float" office:value="80" calcext:value-type="float">
            <text:p>80</text:p>
          </table:table-cell>
          <table:table-cell table:style-name="ce11" office:value-type="string" calcext:value-type="string">
            <text:p>GYマーブルオーブ</text:p>
          </table:table-cell>
          <table:table-cell table:style-name="ce11" table:formula="of:=[.E213]" office:value-type="string" office:string-value="GYマーブルオーブ" calcext:value-type="string">
            <text:p>GYマーブルオーブ</text:p>
          </table:table-cell>
          <table:table-cell table:style-name="ce11" office:value-type="string" calcext:value-type="string">
            <text:p>gyまーぶるおーぶ</text:p>
          </table:table-cell>
          <table:table-cell table:style-name="ce11" office:value-type="string" calcext:value-type="string">
            <text:p>第２弾ブースターパック</text:p>
          </table:table-cell>
          <table:table-cell table:style-name="ce11" table:formula="of:=VLOOKUP([.H213];[$収録番号.$A$1:$収録番号.$B$10];2;0)" office:value-type="float" office:value="25" calcext:value-type="float">
            <text:p>25</text:p>
          </table:table-cell>
          <table:table-cell table:style-name="ce11" office:value-type="string" calcext:value-type="string">
            <text:p>R</text:p>
          </table:table-cell>
          <table:table-cell table:style-name="ce11" table:formula="of:=VLOOKUP([.J213];[$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213];[$種類番号.$A$1:$種類番号.$B$4];2;0)" office:value-type="float" office:value="4" calcext:value-type="float">
            <text:p>4</text:p>
          </table:table-cell>
          <table:table-cell table:style-name="ce11" office:value-type="string" calcext:value-type="string">
            <text:p>緑黄</text:p>
          </table:table-cell>
          <table:table-cell table:style-name="ce11" table:formula="of:=VLOOKUP([.N213];[$色番号.$A$1:$色番号.$B$10];2;0)" office:value-type="float" office:value="44" calcext:value-type="float">
            <text:p>4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13];[$特性番号.$A$1:$特性番号.$B$8];2;0);0)" office:value-type="float" office:value="0" calcext:value-type="float">
            <text:p>0</text:p>
          </table:table-cell>
          <table:table-cell table:style-name="ce11" office:value-type="string" calcext:value-type="string">
            <text:p>魔力ゾーンに置かれたとき、緑か黄の他のマリョクが自分の魔力ゾーンにないなら、自分の戦場のガーディアン1体を山札の上に戻す。</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13];[$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2/card/02_080.png</text:p>
          </table:table-cell>
          <table:table-cell table:style-name="ce11" table:formula="of:=CONCATENATE([$JSON.$A$1];[.$C213];[$JSON.$B$1];[.$E213];[$JSON.$C$1];[.F213];[$JSON.$D$1];[.$G213];[$JSON.$E$1];IF(ISNA([.$T213]);&quot;null&quot;;&quot;&quot;&quot;&quot;&amp;[.$T213]&amp;&quot;&quot;&quot;&quot;);[$JSON.$F$1];[.$V213];[$JSON.$G$1];IF(ISNA([.$X213]);&quot;null&quot;;&quot;&quot;&quot;&quot;&amp;[.$X213]&amp;&quot;&quot;&quot;&quot;);[$JSON.$H$1];[.$AA213];[$JSON.$I$1];[.$I213];[$JSON.$J$1];[.K213];[$JSON.$K$1];[.$M213];[$JSON.$L$1];[.$P213];[$JSON.$M$1];[.$O213];[$JSON.$N$1];[.$S213];[$JSON.$O$1];[.$U213];[$JSON.$P$1];IF(ISNA([.$W213]);&quot;null&quot;;[.$W213]);[$JSON.$Q$1];[.$Y213];[$JSON.$R$1];IF([.$Z213];&quot;true&quot;;&quot;false&quot;);[$JSON.$S$1];[.$A213];[$JSON.$T$1];[.$B213];[$JSON.$U$1])" office:value-type="string" office:string-value="{&quot;id&quot;:&quot;2-80&quot;,&quot;name&quot;:&quot;GYマーブルオーブ&quot;,&quot;displayName&quot;:&quot;GYマーブルオーブ&quot;,&quot;kana&quot;:&quot;gyまーぶるおーぶ&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rarity&quot;:2,&quot;type&quot;:4,&quot;level&quot;:2,&quot;color&quot;:44,&quot;term&quot;:0,&quot;trait&quot;:0,&quot;power&quot;:null,&quot;legacy&quot;:3,&quot;anyNumCopies&quot;:false,&quot;orderTable&quot;:212,&quot;orderDeck&quot;:490}," calcext:value-type="string">
            <text:p>{"id":"2-80","name":"GYマーブルオーブ","displayName":"GYマーブルオーブ","kana":"gyまーぶるおーぶ","traitText":null,"ruleText":"魔力ゾーンに置かれたとき、緑か黄の他のマリョクが自分の魔力ゾーンにないなら、自分の戦場のガーディアン1体を山札の上に戻す。","legacyText":"復元","imageUrl":"https://one-draw.jp/ijinden/cardlist/002/card/02_080.png","expansion":25,"rarity":2,"type":4,"level":2,"color":44,"term":0,"trait":0,"power":null,"legacy":3,"anyNumCopies":false,"orderTable":212,"orderDeck":490},</text:p>
          </table:table-cell>
          <table:table-cell table:number-columns-repeated="16356"/>
        </table:table-row>
        <table:table-row table:style-name="ro2">
          <table:table-cell table:style-name="ce11" office:value-type="float" office:value="213" calcext:value-type="float">
            <text:p>213</text:p>
          </table:table-cell>
          <table:table-cell table:style-name="ce11" office:value-type="float" office:value="175" calcext:value-type="float">
            <text:p>175</text:p>
          </table:table-cell>
          <table:table-cell table:style-name="ce21" office:value-type="string" calcext:value-type="string">
            <text:p>P-1</text:p>
          </table:table-cell>
          <table:table-cell table:style-name="ce21" office:value-type="float" office:value="1" calcext:value-type="float">
            <text:p>1</text:p>
          </table:table-cell>
          <table:table-cell table:style-name="ce11" office:value-type="string" calcext:value-type="string">
            <text:p>マリ・キュリー</text:p>
          </table:table-cell>
          <table:table-cell table:style-name="ce11" table:formula="of:=[.E214]" office:value-type="string" office:string-value="マリ・キュリー" calcext:value-type="string">
            <text:p>マリ・キュリー</text:p>
          </table:table-cell>
          <table:table-cell table:style-name="ce11" office:value-type="string" calcext:value-type="string">
            <text:p>まりきゅりー</text:p>
          </table:table-cell>
          <table:table-cell table:style-name="ce11" office:value-type="string" calcext:value-type="string">
            <text:p>発展する医療デッキ</text:p>
          </table:table-cell>
          <table:table-cell table:style-name="ce11" table:formula="of:=VLOOKUP([.H214];[$収録番号.$A$1:$収録番号.$B$10];2;0)" office:value-type="float" office:value="30" calcext:value-type="float">
            <text:p>30</text:p>
          </table:table-cell>
          <table:table-cell table:style-name="ce11" office:value-type="string" calcext:value-type="string">
            <text:p>SR</text:p>
          </table:table-cell>
          <table:table-cell table:style-name="ce11" table:formula="of:=VLOOKUP([.J21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14];[$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4];[$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14];[$特性番号.$A$1:$特性番号.$B$8];2;0);0)" office:value-type="float" office:value="0" calcext:value-type="float">
            <text:p>0</text:p>
          </table:table-cell>
          <table:table-cell table:style-name="ce11"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table:style-name="ce11" office:value-type="float" office:value="4000" calcext:value-type="float">
            <text:p>4000</text:p>
          </table:table-cell>
          <table:table-cell table:style-name="ce27" office:value-type="string" calcext:value-type="string">
            <text:p>木霊</text:p>
          </table:table-cell>
          <table:table-cell table:style-name="ce11" table:formula="of:=IFERROR(VLOOKUP([.$X214];[$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1.png</text:p>
          </table:table-cell>
          <table:table-cell table:style-name="ce11" table:formula="of:=CONCATENATE([$JSON.$A$1];[.$C214];[$JSON.$B$1];[.$E214];[$JSON.$C$1];[.F214];[$JSON.$D$1];[.$G214];[$JSON.$E$1];IF(ISNA([.$T214]);&quot;null&quot;;&quot;&quot;&quot;&quot;&amp;[.$T214]&amp;&quot;&quot;&quot;&quot;);[$JSON.$F$1];[.$V214];[$JSON.$G$1];IF(ISNA([.$X214]);&quot;null&quot;;&quot;&quot;&quot;&quot;&amp;[.$X214]&amp;&quot;&quot;&quot;&quot;);[$JSON.$H$1];[.$AA214];[$JSON.$I$1];[.$I214];[$JSON.$J$1];[.K214];[$JSON.$K$1];[.$M214];[$JSON.$L$1];[.$P214];[$JSON.$M$1];[.$O214];[$JSON.$N$1];[.$S214];[$JSON.$O$1];[.$U214];[$JSON.$P$1];IF(ISNA([.$W214]);&quot;null&quot;;[.$W214]);[$JSON.$Q$1];[.$Y214];[$JSON.$R$1];IF([.$Z214];&quot;true&quot;;&quot;false&quot;);[$JSON.$S$1];[.$A214];[$JSON.$T$1];[.$B214];[$JSON.$U$1])" office:value-type="string" office:string-value="{&quot;id&quot;:&quot;P-1&quot;,&quot;name&quot;:&quot;マリ・キュリー&quot;,&quot;displayName&quot;:&quot;マリ・キュリー&quot;,&quot;kana&quot;:&quot;まりきゅり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rarity&quot;:4,&quot;type&quot;:1,&quot;level&quot;:4,&quot;color&quot;:16,&quot;term&quot;:0,&quot;trait&quot;:0,&quot;power&quot;:4000,&quot;legacy&quot;:8,&quot;anyNumCopies&quot;:false,&quot;orderTable&quot;:213,&quot;orderDeck&quot;:175}," calcext:value-type="string">
            <text:p>{"id":"P-1","name":"マリ・キュリー","displayName":"マリ・キュリー","kana":"まりきゅり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rarity":4,"type":1,"level":4,"color":16,"term":0,"trait":0,"power":4000,"legacy":8,"anyNumCopies":false,"orderTable":213,"orderDeck":175},</text:p>
          </table:table-cell>
          <table:table-cell table:number-columns-repeated="16356"/>
        </table:table-row>
        <table:table-row table:style-name="ro2">
          <table:table-cell table:style-name="ce11" office:value-type="float" office:value="214" calcext:value-type="float">
            <text:p>214</text:p>
          </table:table-cell>
          <table:table-cell table:style-name="ce11" office:value-type="float" office:value="25" calcext:value-type="float">
            <text:p>25</text:p>
          </table:table-cell>
          <table:table-cell table:style-name="ce21" office:value-type="string" calcext:value-type="string">
            <text:p>P-2</text:p>
          </table:table-cell>
          <table:table-cell table:style-name="ce21" office:value-type="float" office:value="2" calcext:value-type="float">
            <text:p>2</text:p>
          </table:table-cell>
          <table:table-cell table:style-name="ce11" office:value-type="string" calcext:value-type="string">
            <text:p>篤姫</text:p>
          </table:table-cell>
          <table:table-cell table:style-name="ce11" office:value-type="string" calcext:value-type="string">
            <text:p>篤姫 (スターター)</text:p>
          </table:table-cell>
          <table:table-cell table:style-name="ce11" office:value-type="string" calcext:value-type="string">
            <text:p>あつひめ</text:p>
          </table:table-cell>
          <table:table-cell table:style-name="ce11" office:value-type="string" calcext:value-type="string">
            <text:p>発展する医療デッキ</text:p>
          </table:table-cell>
          <table:table-cell table:style-name="ce11" table:formula="of:=VLOOKUP([.H215];[$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1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5];[$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5];[$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15];[$特性番号.$A$1:$特性番号.$B$8];2;0);0)" office:value-type="float" office:value="0" calcext:value-type="float">
            <text:p>0</text:p>
          </table:table-cell>
          <table:table-cell table:style-name="ce11" office:value-type="string" calcext:value-type="string">
            <text:p>戦場に置かれたとき、戦場の裏のカード1つの表を見る。</text:p>
          </table:table-cell>
          <table:table-cell table:style-name="ce11" office:value-type="float" office:value="1000" calcext:value-type="float">
            <text:p>1000</text:p>
          </table:table-cell>
          <table:table-cell table:style-name="ce27" office:value-type="string" calcext:value-type="string">
            <text:p>魔力化</text:p>
          </table:table-cell>
          <table:table-cell table:style-name="ce11" table:formula="of:=IFERROR(VLOOKUP([.$X21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2.png</text:p>
          </table:table-cell>
          <table:table-cell table:style-name="ce11" table:formula="of:=CONCATENATE([$JSON.$A$1];[.$C215];[$JSON.$B$1];[.$E215];[$JSON.$C$1];[.F215];[$JSON.$D$1];[.$G215];[$JSON.$E$1];IF(ISNA([.$T215]);&quot;null&quot;;&quot;&quot;&quot;&quot;&amp;[.$T215]&amp;&quot;&quot;&quot;&quot;);[$JSON.$F$1];[.$V215];[$JSON.$G$1];IF(ISNA([.$X215]);&quot;null&quot;;&quot;&quot;&quot;&quot;&amp;[.$X215]&amp;&quot;&quot;&quot;&quot;);[$JSON.$H$1];[.$AA215];[$JSON.$I$1];[.$I215];[$JSON.$J$1];[.K215];[$JSON.$K$1];[.$M215];[$JSON.$L$1];[.$P215];[$JSON.$M$1];[.$O215];[$JSON.$N$1];[.$S215];[$JSON.$O$1];[.$U215];[$JSON.$P$1];IF(ISNA([.$W215]);&quot;null&quot;;[.$W215]);[$JSON.$Q$1];[.$Y215];[$JSON.$R$1];IF([.$Z215];&quot;true&quot;;&quot;false&quot;);[$JSON.$S$1];[.$A215];[$JSON.$T$1];[.$B215];[$JSON.$U$1])" office:value-type="string" office:string-value="{&quot;id&quot;:&quot;P-2&quot;,&quot;name&quot;:&quot;篤姫&quot;,&quot;displayName&quot;:&quot;篤姫 (スターター)&quot;,&quot;kana&quot;:&quot;あつひめ&quot;,&quot;traitText&quot;:null,&quot;ruleText&quot;:&quot;戦場に置かれたとき、戦場の裏のカード1つの表を見る。&quot;,&quot;legacyText&quot;:&quot;魔力化&quot;,&quot;imageUrl&quot;:&quot;https://one-draw.jp/ijinden/cardlist/P01/card/03_P_002.png&quot;,&quot;expansion&quot;:30,&quot;rarity&quot;:1,&quot;type&quot;:1,&quot;level&quot;:1,&quot;color&quot;:16,&quot;term&quot;:0,&quot;trait&quot;:0,&quot;power&quot;:1000,&quot;legacy&quot;:1,&quot;anyNumCopies&quot;:false,&quot;orderTable&quot;:214,&quot;orderDeck&quot;:25}," calcext:value-type="string">
            <text:p>{"id":"P-2","name":"篤姫","displayName":"篤姫 (スターター)","kana":"あつひめ","traitText":null,"ruleText":"戦場に置かれたとき、戦場の裏のカード1つの表を見る。","legacyText":"魔力化","imageUrl":"https://one-draw.jp/ijinden/cardlist/P01/card/03_P_002.png","expansion":30,"rarity":1,"type":1,"level":1,"color":16,"term":0,"trait":0,"power":1000,"legacy":1,"anyNumCopies":false,"orderTable":214,"orderDeck":25},</text:p>
          </table:table-cell>
          <table:table-cell table:number-columns-repeated="16356"/>
        </table:table-row>
        <table:table-row table:style-name="ro2">
          <table:table-cell table:style-name="ce11" office:value-type="float" office:value="215" calcext:value-type="float">
            <text:p>215</text:p>
          </table:table-cell>
          <table:table-cell table:style-name="ce11" office:value-type="float" office:value="75" calcext:value-type="float">
            <text:p>75</text:p>
          </table:table-cell>
          <table:table-cell table:style-name="ce21" office:value-type="string" calcext:value-type="string">
            <text:p>P-3</text:p>
          </table:table-cell>
          <table:table-cell table:style-name="ce21" office:value-type="float" office:value="3" calcext:value-type="float">
            <text:p>3</text:p>
          </table:table-cell>
          <table:table-cell table:style-name="ce11" office:value-type="string" calcext:value-type="string">
            <text:p>李成桂</text:p>
          </table:table-cell>
          <table:table-cell table:style-name="ce11" table:formula="of:=[.E216]" office:value-type="string" office:string-value="李成桂" calcext:value-type="string">
            <text:p>李成桂</text:p>
          </table:table-cell>
          <table:table-cell table:style-name="ce11" office:value-type="string" calcext:value-type="string">
            <text:p>りせいけい</text:p>
          </table:table-cell>
          <table:table-cell table:style-name="ce11" office:value-type="string" calcext:value-type="string">
            <text:p>発展する医療デッキ</text:p>
          </table:table-cell>
          <table:table-cell table:style-name="ce11" table:formula="of:=VLOOKUP([.H216];[$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1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6];[$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6];[$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16];[$特性番号.$A$1:$特性番号.$B$8];2;0);0)" office:value-type="float" office:value="0" calcext:value-type="float">
            <text:p>0</text:p>
          </table:table-cell>
          <table:table-cell table:style-name="ce11" office:value-type="string" calcext:value-type="string">
            <text:p>スタンド¶戦場に置かれたとき、自分の戦場のガーディアン1体か、自分の墓地のカード1つを指定して発動できる。そのカードを山札の上に戻す。</text:p>
          </table:table-cell>
          <table:table-cell table:style-name="ce11" office:value-type="float" office:value="1000" calcext:value-type="float">
            <text:p>1000</text:p>
          </table:table-cell>
          <table:table-cell table:style-name="ce27" office:value-type="string" calcext:value-type="string">
            <text:p>1ドローする</text:p>
          </table:table-cell>
          <table:table-cell table:style-name="ce11" table:formula="of:=IFERROR(VLOOKUP([.$X21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3.png</text:p>
          </table:table-cell>
          <table:table-cell table:style-name="ce11" table:formula="of:=CONCATENATE([$JSON.$A$1];[.$C216];[$JSON.$B$1];[.$E216];[$JSON.$C$1];[.F216];[$JSON.$D$1];[.$G216];[$JSON.$E$1];IF(ISNA([.$T216]);&quot;null&quot;;&quot;&quot;&quot;&quot;&amp;[.$T216]&amp;&quot;&quot;&quot;&quot;);[$JSON.$F$1];[.$V216];[$JSON.$G$1];IF(ISNA([.$X216]);&quot;null&quot;;&quot;&quot;&quot;&quot;&amp;[.$X216]&amp;&quot;&quot;&quot;&quot;);[$JSON.$H$1];[.$AA216];[$JSON.$I$1];[.$I216];[$JSON.$J$1];[.K216];[$JSON.$K$1];[.$M216];[$JSON.$L$1];[.$P216];[$JSON.$M$1];[.$O216];[$JSON.$N$1];[.$S216];[$JSON.$O$1];[.$U216];[$JSON.$P$1];IF(ISNA([.$W216]);&quot;null&quot;;[.$W216]);[$JSON.$Q$1];[.$Y216];[$JSON.$R$1];IF([.$Z216];&quot;true&quot;;&quot;false&quot;);[$JSON.$S$1];[.$A216];[$JSON.$T$1];[.$B216];[$JSON.$U$1])" office:value-type="string" office:string-value="{&quot;id&quot;:&quot;P-3&quot;,&quot;name&quot;:&quot;李成桂&quot;,&quot;displayName&quot;:&quot;李成桂&quot;,&quot;kana&quot;:&quot;りせいけい&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rarity&quot;:1,&quot;type&quot;:1,&quot;level&quot;:2,&quot;color&quot;:16,&quot;term&quot;:0,&quot;trait&quot;:0,&quot;power&quot;:1000,&quot;legacy&quot;:4,&quot;anyNumCopies&quot;:false,&quot;orderTable&quot;:215,&quot;orderDeck&quot;:75}," calcext:value-type="string">
            <text:p>{"id":"P-3","name":"李成桂","displayName":"李成桂","kana":"りせいけい","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rarity":1,"type":1,"level":2,"color":16,"term":0,"trait":0,"power":1000,"legacy":4,"anyNumCopies":false,"orderTable":215,"orderDeck":75},</text:p>
          </table:table-cell>
          <table:table-cell table:number-columns-repeated="16356"/>
        </table:table-row>
        <table:table-row table:style-name="ro2">
          <table:table-cell table:style-name="ce11" office:value-type="float" office:value="216" calcext:value-type="float">
            <text:p>216</text:p>
          </table:table-cell>
          <table:table-cell table:style-name="ce11" office:value-type="float" office:value="176" calcext:value-type="float">
            <text:p>176</text:p>
          </table:table-cell>
          <table:table-cell table:style-name="ce21" office:value-type="string" calcext:value-type="string">
            <text:p>P-4</text:p>
          </table:table-cell>
          <table:table-cell table:style-name="ce21" office:value-type="float" office:value="4" calcext:value-type="float">
            <text:p>4</text:p>
          </table:table-cell>
          <table:table-cell table:style-name="ce11" office:value-type="string" calcext:value-type="string">
            <text:p>杉田玄白</text:p>
          </table:table-cell>
          <table:table-cell table:style-name="ce11" table:formula="of:=[.E217]" office:value-type="string" office:string-value="杉田玄白" calcext:value-type="string">
            <text:p>杉田玄白</text:p>
          </table:table-cell>
          <table:table-cell table:style-name="ce11" office:value-type="string" calcext:value-type="string">
            <text:p>すぎたげんぱく</text:p>
          </table:table-cell>
          <table:table-cell table:style-name="ce11" office:value-type="string" calcext:value-type="string">
            <text:p>発展する医療デッキ</text:p>
          </table:table-cell>
          <table:table-cell table:style-name="ce11" table:formula="of:=VLOOKUP([.H217];[$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1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7];[$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7];[$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7];[$能力語番号.$A$1:$能力語番号.$B$11];2;0);0)" office:value-type="float" office:value="0" calcext:value-type="float">
            <text:p>0</text:p>
          </table:table-cell>
          <table:table-cell office:value-type="string" calcext:value-type="string">
            <text:p>医術</text:p>
          </table:table-cell>
          <table:table-cell table:style-name="ce11" table:formula="of:=IFERROR(VLOOKUP([.$T217];[$特性番号.$A$1:$特性番号.$B$8];2;0);0)" office:value-type="float" office:value="16" calcext:value-type="float">
            <text:p>16</text:p>
          </table:table-cell>
          <table:table-cell table:style-name="ce11" office:value-type="string" calcext:value-type="string">
            <text:p>能力によって手札から墓地にイジンでないカードが置かれるたび、そのカードのプレイヤーの山札の上から1枚を墓地に置く。</text:p>
          </table:table-cell>
          <table:table-cell table:style-name="ce11" office:value-type="float" office:value="4000" calcext:value-type="float">
            <text:p>4000</text:p>
          </table:table-cell>
          <table:table-cell table:style-name="ce27" table:formula="of:=NA()" office:value-type="string" office:string-value="" calcext:value-type="error">
            <text:p>#N/A</text:p>
          </table:table-cell>
          <table:table-cell table:style-name="ce11" table:formula="of:=IFERROR(VLOOKUP([.$X21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4.png</text:p>
          </table:table-cell>
          <table:table-cell table:style-name="ce11" table:formula="of:=CONCATENATE([$JSON.$A$1];[.$C217];[$JSON.$B$1];[.$E217];[$JSON.$C$1];[.F217];[$JSON.$D$1];[.$G217];[$JSON.$E$1];IF(ISNA([.$T217]);&quot;null&quot;;&quot;&quot;&quot;&quot;&amp;[.$T217]&amp;&quot;&quot;&quot;&quot;);[$JSON.$F$1];[.$V217];[$JSON.$G$1];IF(ISNA([.$X217]);&quot;null&quot;;&quot;&quot;&quot;&quot;&amp;[.$X217]&amp;&quot;&quot;&quot;&quot;);[$JSON.$H$1];[.$AA217];[$JSON.$I$1];[.$I217];[$JSON.$J$1];[.K217];[$JSON.$K$1];[.$M217];[$JSON.$L$1];[.$P217];[$JSON.$M$1];[.$O217];[$JSON.$N$1];[.$S217];[$JSON.$O$1];[.$U217];[$JSON.$P$1];IF(ISNA([.$W217]);&quot;null&quot;;[.$W217]);[$JSON.$Q$1];[.$Y217];[$JSON.$R$1];IF([.$Z217];&quot;true&quot;;&quot;false&quot;);[$JSON.$S$1];[.$A217];[$JSON.$T$1];[.$B217];[$JSON.$U$1])" office:value-type="string" office:string-value="{&quot;id&quot;:&quot;P-4&quot;,&quot;name&quot;:&quot;杉田玄白&quot;,&quot;displayName&quot;:&quot;杉田玄白&quot;,&quot;kana&quot;:&quot;すぎたげんぱく&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rarity&quot;:1,&quot;type&quot;:1,&quot;level&quot;:4,&quot;color&quot;:16,&quot;term&quot;:0,&quot;trait&quot;:16,&quot;power&quot;:4000,&quot;legacy&quot;:0,&quot;anyNumCopies&quot;:false,&quot;orderTable&quot;:216,&quot;orderDeck&quot;:176}," calcext:value-type="string">
            <text:p>{"id":"P-4","name":"杉田玄白","displayName":"杉田玄白","kana":"すぎたげんぱく","traitText":"医術","ruleText":"能力によって手札から墓地にイジンでないカードが置かれるたび、そのカードのプレイヤーの山札の上から1枚を墓地に置く。","legacyText":null,"imageUrl":"https://one-draw.jp/ijinden/cardlist/P01/card/03_P_004.png","expansion":30,"rarity":1,"type":1,"level":4,"color":16,"term":0,"trait":16,"power":4000,"legacy":0,"anyNumCopies":false,"orderTable":216,"orderDeck":176},</text:p>
          </table:table-cell>
          <table:table-cell table:number-columns-repeated="16356"/>
        </table:table-row>
        <table:table-row table:style-name="ro2">
          <table:table-cell table:style-name="ce11" office:value-type="float" office:value="217" calcext:value-type="float">
            <text:p>217</text:p>
          </table:table-cell>
          <table:table-cell table:style-name="ce11" office:value-type="float" office:value="76" calcext:value-type="float">
            <text:p>76</text:p>
          </table:table-cell>
          <table:table-cell table:style-name="ce21" office:value-type="string" calcext:value-type="string">
            <text:p>P-5</text:p>
          </table:table-cell>
          <table:table-cell table:style-name="ce21" office:value-type="float" office:value="5" calcext:value-type="float">
            <text:p>5</text:p>
          </table:table-cell>
          <table:table-cell table:style-name="ce11" office:value-type="string" calcext:value-type="string">
            <text:p>渡辺崋山</text:p>
          </table:table-cell>
          <table:table-cell table:style-name="ce11" table:formula="of:=[.E218]" office:value-type="string" office:string-value="渡辺崋山" calcext:value-type="string">
            <text:p>渡辺崋山</text:p>
          </table:table-cell>
          <table:table-cell table:style-name="ce11" office:value-type="string" calcext:value-type="string">
            <text:p>わたなべかざん</text:p>
          </table:table-cell>
          <table:table-cell table:style-name="ce11" office:value-type="string" calcext:value-type="string">
            <text:p>発展する医療デッキ</text:p>
          </table:table-cell>
          <table:table-cell table:style-name="ce11" table:formula="of:=VLOOKUP([.H218];[$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1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8];[$能力語番号.$A$1:$能力語番号.$B$11];2;0);0)" office:value-type="float" office:value="0" calcext:value-type="float">
            <text:p>0</text:p>
          </table:table-cell>
          <table:table-cell office:value-type="string" calcext:value-type="string">
            <text:p>美術</text:p>
          </table:table-cell>
          <table:table-cell table:style-name="ce11" table:formula="of:=IFERROR(VLOOKUP([.$T218];[$特性番号.$A$1:$特性番号.$B$8];2;0);0)" office:value-type="float" office:value="2" calcext:value-type="float">
            <text:p>2</text:p>
          </table:table-cell>
          <table:table-cell table:style-name="ce11"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table:style-name="ce11" office:value-type="float" office:value="500" calcext:value-type="float">
            <text:p>500</text:p>
          </table:table-cell>
          <table:table-cell table:style-name="ce27" table:formula="of:=NA()" office:value-type="string" office:string-value="" calcext:value-type="error">
            <text:p>#N/A</text:p>
          </table:table-cell>
          <table:table-cell table:style-name="ce11" table:formula="of:=IFERROR(VLOOKUP([.$X21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5.png</text:p>
          </table:table-cell>
          <table:table-cell table:style-name="ce11" table:formula="of:=CONCATENATE([$JSON.$A$1];[.$C218];[$JSON.$B$1];[.$E218];[$JSON.$C$1];[.F218];[$JSON.$D$1];[.$G218];[$JSON.$E$1];IF(ISNA([.$T218]);&quot;null&quot;;&quot;&quot;&quot;&quot;&amp;[.$T218]&amp;&quot;&quot;&quot;&quot;);[$JSON.$F$1];[.$V218];[$JSON.$G$1];IF(ISNA([.$X218]);&quot;null&quot;;&quot;&quot;&quot;&quot;&amp;[.$X218]&amp;&quot;&quot;&quot;&quot;);[$JSON.$H$1];[.$AA218];[$JSON.$I$1];[.$I218];[$JSON.$J$1];[.K218];[$JSON.$K$1];[.$M218];[$JSON.$L$1];[.$P218];[$JSON.$M$1];[.$O218];[$JSON.$N$1];[.$S218];[$JSON.$O$1];[.$U218];[$JSON.$P$1];IF(ISNA([.$W218]);&quot;null&quot;;[.$W218]);[$JSON.$Q$1];[.$Y218];[$JSON.$R$1];IF([.$Z218];&quot;true&quot;;&quot;false&quot;);[$JSON.$S$1];[.$A218];[$JSON.$T$1];[.$B218];[$JSON.$U$1])" office:value-type="string" office:string-value="{&quot;id&quot;:&quot;P-5&quot;,&quot;name&quot;:&quot;渡辺崋山&quot;,&quot;displayName&quot;:&quot;渡辺崋山&quot;,&quot;kana&quot;:&quot;わたなべかざん&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rarity&quot;:1,&quot;type&quot;:1,&quot;level&quot;:2,&quot;color&quot;:16,&quot;term&quot;:0,&quot;trait&quot;:2,&quot;power&quot;:500,&quot;legacy&quot;:0,&quot;anyNumCopies&quot;:false,&quot;orderTable&quot;:217,&quot;orderDeck&quot;:76}," calcext:value-type="string">
            <text:p>{"id":"P-5","name":"渡辺崋山","displayName":"渡辺崋山","kana":"わたなべかざん","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rarity":1,"type":1,"level":2,"color":16,"term":0,"trait":2,"power":500,"legacy":0,"anyNumCopies":false,"orderTable":217,"orderDeck":76},</text:p>
          </table:table-cell>
          <table:table-cell table:number-columns-repeated="16356"/>
        </table:table-row>
        <table:table-row table:style-name="ro2">
          <table:table-cell table:style-name="ce11" office:value-type="float" office:value="218" calcext:value-type="float">
            <text:p>218</text:p>
          </table:table-cell>
          <table:table-cell table:style-name="ce11" office:value-type="float" office:value="129" calcext:value-type="float">
            <text:p>129</text:p>
          </table:table-cell>
          <table:table-cell table:style-name="ce21" office:value-type="string" calcext:value-type="string">
            <text:p>P-6</text:p>
          </table:table-cell>
          <table:table-cell table:style-name="ce21" office:value-type="float" office:value="6" calcext:value-type="float">
            <text:p>6</text:p>
          </table:table-cell>
          <table:table-cell table:style-name="ce11" office:value-type="string" calcext:value-type="string">
            <text:p>緒方洪庵</text:p>
          </table:table-cell>
          <table:table-cell table:style-name="ce11" table:formula="of:=[.E219]" office:value-type="string" office:string-value="緒方洪庵" calcext:value-type="string">
            <text:p>緒方洪庵</text:p>
          </table:table-cell>
          <table:table-cell table:style-name="ce11" office:value-type="string" calcext:value-type="string">
            <text:p>おがたこうあん</text:p>
          </table:table-cell>
          <table:table-cell table:style-name="ce11" office:value-type="string" calcext:value-type="string">
            <text:p>発展する医療デッキ</text:p>
          </table:table-cell>
          <table:table-cell table:style-name="ce11" table:formula="of:=VLOOKUP([.H219];[$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1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1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1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19];[$能力語番号.$A$1:$能力語番号.$B$11];2;0);0)" office:value-type="float" office:value="0" calcext:value-type="float">
            <text:p>0</text:p>
          </table:table-cell>
          <table:table-cell office:value-type="string" calcext:value-type="string">
            <text:p>医術</text:p>
          </table:table-cell>
          <table:table-cell table:style-name="ce11" table:formula="of:=IFERROR(VLOOKUP([.$T219];[$特性番号.$A$1:$特性番号.$B$8];2;0);0)" office:value-type="float" office:value="16" calcext:value-type="float">
            <text:p>16</text:p>
          </table:table-cell>
          <table:table-cell table:style-name="ce11" office:value-type="string" calcext:value-type="string">
            <text:p>能力によって手札から墓地にイジンが置かれるたび、そのカードのプレイヤーは1ドローする。</text:p>
          </table:table-cell>
          <table:table-cell table:style-name="ce11" office:value-type="float" office:value="2500" calcext:value-type="float">
            <text:p>2500</text:p>
          </table:table-cell>
          <table:table-cell table:style-name="ce27" office:value-type="string" calcext:value-type="string">
            <text:p>木霊</text:p>
          </table:table-cell>
          <table:table-cell table:style-name="ce11" table:formula="of:=IFERROR(VLOOKUP([.$X219];[$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6.png</text:p>
          </table:table-cell>
          <table:table-cell table:style-name="ce11" table:formula="of:=CONCATENATE([$JSON.$A$1];[.$C219];[$JSON.$B$1];[.$E219];[$JSON.$C$1];[.F219];[$JSON.$D$1];[.$G219];[$JSON.$E$1];IF(ISNA([.$T219]);&quot;null&quot;;&quot;&quot;&quot;&quot;&amp;[.$T219]&amp;&quot;&quot;&quot;&quot;);[$JSON.$F$1];[.$V219];[$JSON.$G$1];IF(ISNA([.$X219]);&quot;null&quot;;&quot;&quot;&quot;&quot;&amp;[.$X219]&amp;&quot;&quot;&quot;&quot;);[$JSON.$H$1];[.$AA219];[$JSON.$I$1];[.$I219];[$JSON.$J$1];[.K219];[$JSON.$K$1];[.$M219];[$JSON.$L$1];[.$P219];[$JSON.$M$1];[.$O219];[$JSON.$N$1];[.$S219];[$JSON.$O$1];[.$U219];[$JSON.$P$1];IF(ISNA([.$W219]);&quot;null&quot;;[.$W219]);[$JSON.$Q$1];[.$Y219];[$JSON.$R$1];IF([.$Z219];&quot;true&quot;;&quot;false&quot;);[$JSON.$S$1];[.$A219];[$JSON.$T$1];[.$B219];[$JSON.$U$1])" office:value-type="string" office:string-value="{&quot;id&quot;:&quot;P-6&quot;,&quot;name&quot;:&quot;緒方洪庵&quot;,&quot;displayName&quot;:&quot;緒方洪庵&quot;,&quot;kana&quot;:&quot;おがたこうあん&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rarity&quot;:1,&quot;type&quot;:1,&quot;level&quot;:3,&quot;color&quot;:16,&quot;term&quot;:0,&quot;trait&quot;:16,&quot;power&quot;:2500,&quot;legacy&quot;:8,&quot;anyNumCopies&quot;:false,&quot;orderTable&quot;:218,&quot;orderDeck&quot;:129}," calcext:value-type="string">
            <text:p>{"id":"P-6","name":"緒方洪庵","displayName":"緒方洪庵","kana":"おがたこうあん","traitText":"医術","ruleText":"能力によって手札から墓地にイジンが置かれるたび、そのカードのプレイヤーは1ドローする。","legacyText":"木霊","imageUrl":"https://one-draw.jp/ijinden/cardlist/P01/card/03_P_006.png","expansion":30,"rarity":1,"type":1,"level":3,"color":16,"term":0,"trait":16,"power":2500,"legacy":8,"anyNumCopies":false,"orderTable":218,"orderDeck":129},</text:p>
          </table:table-cell>
          <table:table-cell table:number-columns-repeated="16356"/>
        </table:table-row>
        <table:table-row table:style-name="ro2">
          <table:table-cell table:style-name="ce11" office:value-type="float" office:value="219" calcext:value-type="float">
            <text:p>219</text:p>
          </table:table-cell>
          <table:table-cell table:style-name="ce11" office:value-type="float" office:value="221" calcext:value-type="float">
            <text:p>221</text:p>
          </table:table-cell>
          <table:table-cell table:style-name="ce21" office:value-type="string" calcext:value-type="string">
            <text:p>P-7</text:p>
          </table:table-cell>
          <table:table-cell table:style-name="ce21" office:value-type="float" office:value="7" calcext:value-type="float">
            <text:p>7</text:p>
          </table:table-cell>
          <table:table-cell table:style-name="ce11" office:value-type="string" calcext:value-type="string">
            <text:p>岡田以蔵</text:p>
          </table:table-cell>
          <table:table-cell table:style-name="ce11" office:value-type="string" calcext:value-type="string">
            <text:p>岡田以蔵 (スターター)</text:p>
          </table:table-cell>
          <table:table-cell table:style-name="ce11" office:value-type="string" calcext:value-type="string">
            <text:p>おかだいぞう</text:p>
          </table:table-cell>
          <table:table-cell table:style-name="ce11" office:value-type="string" calcext:value-type="string">
            <text:p>発展する医療デッキ</text:p>
          </table:table-cell>
          <table:table-cell table:style-name="ce11" table:formula="of:=VLOOKUP([.H220];[$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2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0];[$種類番号.$A$1:$種類番号.$B$4];2;0)" office:value-type="float" office:value="1" calcext:value-type="float">
            <text:p>1</text:p>
          </table:table-cell>
          <table:table-cell table:style-name="ce11" office:value-type="string" calcext:value-type="string">
            <text:p>紫</text:p>
          </table:table-cell>
          <table:table-cell table:style-name="ce11" table:formula="of:=VLOOKUP([.N220];[$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0];[$能力語番号.$A$1:$能力語番号.$B$11];2;0);0)" office:value-type="float" office:value="0" calcext:value-type="float">
            <text:p>0</text:p>
          </table:table-cell>
          <table:table-cell office:value-type="string" calcext:value-type="string">
            <text:p>剣術</text:p>
          </table:table-cell>
          <table:table-cell table:style-name="ce11" table:formula="of:=IFERROR(VLOOKUP([.$T220];[$特性番号.$A$1:$特性番号.$B$8];2;0);0)" office:value-type="float" office:value="1" calcext:value-type="float">
            <text:p>1</text:p>
          </table:table-cell>
          <table:table-cell table:style-name="ce11" office:value-type="string" calcext:value-type="string">
            <text:p>即応¶相手の墓地のイジン1体につき「パワー+2000」を得る。¶パワー6000以上の間「寝たとき、イジンかガーディアンを1体を破壊する」を得る。</text:p>
          </table:table-cell>
          <table:table-cell table:style-name="ce11" office:value-type="float" office:value="2000" calcext:value-type="float">
            <text:p>2000</text:p>
          </table:table-cell>
          <table:table-cell table:style-name="ce27" table:formula="of:=NA()" office:value-type="string" office:string-value="" calcext:value-type="error">
            <text:p>#N/A</text:p>
          </table:table-cell>
          <table:table-cell table:style-name="ce11" table:formula="of:=IFERROR(VLOOKUP([.$X22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7.png</text:p>
          </table:table-cell>
          <table:table-cell table:style-name="ce11" table:formula="of:=CONCATENATE([$JSON.$A$1];[.$C220];[$JSON.$B$1];[.$E220];[$JSON.$C$1];[.F220];[$JSON.$D$1];[.$G220];[$JSON.$E$1];IF(ISNA([.$T220]);&quot;null&quot;;&quot;&quot;&quot;&quot;&amp;[.$T220]&amp;&quot;&quot;&quot;&quot;);[$JSON.$F$1];[.$V220];[$JSON.$G$1];IF(ISNA([.$X220]);&quot;null&quot;;&quot;&quot;&quot;&quot;&amp;[.$X220]&amp;&quot;&quot;&quot;&quot;);[$JSON.$H$1];[.$AA220];[$JSON.$I$1];[.$I220];[$JSON.$J$1];[.K220];[$JSON.$K$1];[.$M220];[$JSON.$L$1];[.$P220];[$JSON.$M$1];[.$O220];[$JSON.$N$1];[.$S220];[$JSON.$O$1];[.$U220];[$JSON.$P$1];IF(ISNA([.$W220]);&quot;null&quot;;[.$W220]);[$JSON.$Q$1];[.$Y220];[$JSON.$R$1];IF([.$Z220];&quot;true&quot;;&quot;false&quot;);[$JSON.$S$1];[.$A220];[$JSON.$T$1];[.$B220];[$JSON.$U$1])" office:value-type="string" office:string-value="{&quot;id&quot;:&quot;P-7&quot;,&quot;name&quot;:&quot;岡田以蔵&quot;,&quot;displayName&quot;:&quot;岡田以蔵 (スターター)&quot;,&quot;kana&quot;:&quot;おかだいぞう&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rarity&quot;:1,&quot;type&quot;:1,&quot;level&quot;:5,&quot;color&quot;:16,&quot;term&quot;:0,&quot;trait&quot;:1,&quot;power&quot;:2000,&quot;legacy&quot;:0,&quot;anyNumCopies&quot;:false,&quot;orderTable&quot;:219,&quot;orderDeck&quot;:221}," calcext:value-type="string">
            <text:p>{"id":"P-7","name":"岡田以蔵","displayName":"岡田以蔵 (スターター)","kana":"おかだいぞう","traitText":"剣術","ruleText":"即応¶相手の墓地のイジン1体につき「パワー+2000」を得る。¶パワー6000以上の間「寝たとき、イジンかガーディアンを1体を破壊する」を得る。","legacyText":null,"imageUrl":"https://one-draw.jp/ijinden/cardlist/P01/card/03_P_007.png","expansion":30,"rarity":1,"type":1,"level":5,"color":16,"term":0,"trait":1,"power":2000,"legacy":0,"anyNumCopies":false,"orderTable":219,"orderDeck":221},</text:p>
          </table:table-cell>
          <table:table-cell table:number-columns-repeated="16356"/>
        </table:table-row>
        <table:table-row table:style-name="ro2">
          <table:table-cell table:style-name="ce11" office:value-type="float" office:value="220" calcext:value-type="float">
            <text:p>220</text:p>
          </table:table-cell>
          <table:table-cell table:style-name="ce11" office:value-type="float" office:value="130" calcext:value-type="float">
            <text:p>130</text:p>
          </table:table-cell>
          <table:table-cell table:style-name="ce21" office:value-type="string" calcext:value-type="string">
            <text:p>P-8</text:p>
          </table:table-cell>
          <table:table-cell table:style-name="ce21" office:value-type="float" office:value="8" calcext:value-type="float">
            <text:p>8</text:p>
          </table:table-cell>
          <table:table-cell table:style-name="ce11" office:value-type="string" calcext:value-type="string">
            <text:p>クララ・バートン</text:p>
          </table:table-cell>
          <table:table-cell table:style-name="ce11" table:formula="of:=[.E221]" office:value-type="string" office:string-value="クララ・バートン" calcext:value-type="string">
            <text:p>クララ・バートン</text:p>
          </table:table-cell>
          <table:table-cell table:style-name="ce11" office:value-type="string" calcext:value-type="string">
            <text:p>くららばーとん</text:p>
          </table:table-cell>
          <table:table-cell table:style-name="ce11" office:value-type="string" calcext:value-type="string">
            <text:p>発展する医療デッキ</text:p>
          </table:table-cell>
          <table:table-cell table:style-name="ce11" table:formula="of:=VLOOKUP([.H221];[$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21];[$種類番号.$A$1:$種類番号.$B$4];2;0)" office:value-type="float" office:value="1" calcext:value-type="float">
            <text:p>1</text:p>
          </table:table-cell>
          <table:table-cell table:style-name="ce11" office:value-type="string" calcext:value-type="string">
            <text:p>紫</text:p>
          </table:table-cell>
          <table:table-cell table:style-name="ce11" table:formula="of:=VLOOKUP([.N221];[$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1];[$能力語番号.$A$1:$能力語番号.$B$11];2;0);0)" office:value-type="float" office:value="0" calcext:value-type="float">
            <text:p>0</text:p>
          </table:table-cell>
          <table:table-cell office:value-type="string" calcext:value-type="string">
            <text:p>医術</text:p>
          </table:table-cell>
          <table:table-cell table:style-name="ce11" table:formula="of:=IFERROR(VLOOKUP([.$T221];[$特性番号.$A$1:$特性番号.$B$8];2;0);0)" office:value-type="float" office:value="16" calcext:value-type="float">
            <text:p>16</text:p>
          </table:table-cell>
          <table:table-cell table:style-name="ce11"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table:style-name="ce11" office:value-type="float" office:value="3000" calcext:value-type="float">
            <text:p>3000</text:p>
          </table:table-cell>
          <table:table-cell table:style-name="ce27" table:formula="of:=NA()" office:value-type="string" office:string-value="" calcext:value-type="error">
            <text:p>#N/A</text:p>
          </table:table-cell>
          <table:table-cell table:style-name="ce11" table:formula="of:=IFERROR(VLOOKUP([.$X22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8.png</text:p>
          </table:table-cell>
          <table:table-cell table:style-name="ce11" table:formula="of:=CONCATENATE([$JSON.$A$1];[.$C221];[$JSON.$B$1];[.$E221];[$JSON.$C$1];[.F221];[$JSON.$D$1];[.$G221];[$JSON.$E$1];IF(ISNA([.$T221]);&quot;null&quot;;&quot;&quot;&quot;&quot;&amp;[.$T221]&amp;&quot;&quot;&quot;&quot;);[$JSON.$F$1];[.$V221];[$JSON.$G$1];IF(ISNA([.$X221]);&quot;null&quot;;&quot;&quot;&quot;&quot;&amp;[.$X221]&amp;&quot;&quot;&quot;&quot;);[$JSON.$H$1];[.$AA221];[$JSON.$I$1];[.$I221];[$JSON.$J$1];[.K221];[$JSON.$K$1];[.$M221];[$JSON.$L$1];[.$P221];[$JSON.$M$1];[.$O221];[$JSON.$N$1];[.$S221];[$JSON.$O$1];[.$U221];[$JSON.$P$1];IF(ISNA([.$W221]);&quot;null&quot;;[.$W221]);[$JSON.$Q$1];[.$Y221];[$JSON.$R$1];IF([.$Z221];&quot;true&quot;;&quot;false&quot;);[$JSON.$S$1];[.$A221];[$JSON.$T$1];[.$B221];[$JSON.$U$1])" office:value-type="string" office:string-value="{&quot;id&quot;:&quot;P-8&quot;,&quot;name&quot;:&quot;クララ・バートン&quot;,&quot;displayName&quot;:&quot;クララ・バートン&quot;,&quot;kana&quot;:&quot;くららばーとん&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rarity&quot;:1,&quot;type&quot;:1,&quot;level&quot;:3,&quot;color&quot;:16,&quot;term&quot;:0,&quot;trait&quot;:16,&quot;power&quot;:3000,&quot;legacy&quot;:0,&quot;anyNumCopies&quot;:false,&quot;orderTable&quot;:220,&quot;orderDeck&quot;:130}," calcext:value-type="string">
            <text:p>{"id":"P-8","name":"クララ・バートン","displayName":"クララ・バートン","kana":"くららばーとん","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rarity":1,"type":1,"level":3,"color":16,"term":0,"trait":16,"power":3000,"legacy":0,"anyNumCopies":false,"orderTable":220,"orderDeck":130},</text:p>
          </table:table-cell>
          <table:table-cell table:number-columns-repeated="16356"/>
        </table:table-row>
        <table:table-row table:style-name="ro2">
          <table:table-cell table:style-name="ce11" office:value-type="float" office:value="221" calcext:value-type="float">
            <text:p>221</text:p>
          </table:table-cell>
          <table:table-cell table:style-name="ce11" office:value-type="float" office:value="353" calcext:value-type="float">
            <text:p>353</text:p>
          </table:table-cell>
          <table:table-cell table:style-name="ce21" office:value-type="string" calcext:value-type="string">
            <text:p>P-9</text:p>
          </table:table-cell>
          <table:table-cell table:style-name="ce21" office:value-type="float" office:value="9" calcext:value-type="float">
            <text:p>9</text:p>
          </table:table-cell>
          <table:table-cell table:style-name="ce11" office:value-type="string" calcext:value-type="string">
            <text:p>虎狼痢</text:p>
          </table:table-cell>
          <table:table-cell table:style-name="ce11" table:formula="of:=[.E222]" office:value-type="string" office:string-value="虎狼痢" calcext:value-type="string">
            <text:p>虎狼痢</text:p>
          </table:table-cell>
          <table:table-cell table:style-name="ce11" office:value-type="string" calcext:value-type="string">
            <text:p>ころり</text:p>
          </table:table-cell>
          <table:table-cell table:style-name="ce11" office:value-type="string" calcext:value-type="string">
            <text:p>発展する医療デッキ</text:p>
          </table:table-cell>
          <table:table-cell table:style-name="ce11" table:formula="of:=VLOOKUP([.H222];[$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2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22];[$種類番号.$A$1:$種類番号.$B$4];2;0)" office:value-type="float" office:value="2" calcext:value-type="float">
            <text:p>2</text:p>
          </table:table-cell>
          <table:table-cell table:style-name="ce11" office:value-type="string" calcext:value-type="string">
            <text:p>紫</text:p>
          </table:table-cell>
          <table:table-cell table:style-name="ce11" table:formula="of:=VLOOKUP([.N222];[$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22];[$特性番号.$A$1:$特性番号.$B$8];2;0);0)" office:value-type="float" office:value="0" calcext:value-type="float">
            <text:p>0</text:p>
          </table:table-cell>
          <table:table-cell table:style-name="ce11"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table:style-name="ce11" table:formula="of:=NA()" office:value-type="string" office:string-value="" calcext:value-type="error">
            <text:p>#N/A</text:p>
          </table:table-cell>
          <table:table-cell table:style-name="ce27" office:value-type="string" calcext:value-type="string">
            <text:p>手札に戻す</text:p>
          </table:table-cell>
          <table:table-cell table:style-name="ce11" table:formula="of:=IFERROR(VLOOKUP([.$X22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09.png</text:p>
          </table:table-cell>
          <table:table-cell table:style-name="ce11" table:formula="of:=CONCATENATE([$JSON.$A$1];[.$C222];[$JSON.$B$1];[.$E222];[$JSON.$C$1];[.F222];[$JSON.$D$1];[.$G222];[$JSON.$E$1];IF(ISNA([.$T222]);&quot;null&quot;;&quot;&quot;&quot;&quot;&amp;[.$T222]&amp;&quot;&quot;&quot;&quot;);[$JSON.$F$1];[.$V222];[$JSON.$G$1];IF(ISNA([.$X222]);&quot;null&quot;;&quot;&quot;&quot;&quot;&amp;[.$X222]&amp;&quot;&quot;&quot;&quot;);[$JSON.$H$1];[.$AA222];[$JSON.$I$1];[.$I222];[$JSON.$J$1];[.K222];[$JSON.$K$1];[.$M222];[$JSON.$L$1];[.$P222];[$JSON.$M$1];[.$O222];[$JSON.$N$1];[.$S222];[$JSON.$O$1];[.$U222];[$JSON.$P$1];IF(ISNA([.$W222]);&quot;null&quot;;[.$W222]);[$JSON.$Q$1];[.$Y222];[$JSON.$R$1];IF([.$Z222];&quot;true&quot;;&quot;false&quot;);[$JSON.$S$1];[.$A222];[$JSON.$T$1];[.$B222];[$JSON.$U$1])" office:value-type="string" office:string-value="{&quot;id&quot;:&quot;P-9&quot;,&quot;name&quot;:&quot;虎狼痢&quot;,&quot;displayName&quot;:&quot;虎狼痢&quot;,&quot;kana&quot;:&quot;ころり&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rarity&quot;:1,&quot;type&quot;:2,&quot;level&quot;:6,&quot;color&quot;:16,&quot;term&quot;:0,&quot;trait&quot;:0,&quot;power&quot;:null,&quot;legacy&quot;:5,&quot;anyNumCopies&quot;:false,&quot;orderTable&quot;:221,&quot;orderDeck&quot;:353}," calcext:value-type="string">
            <text:p>{"id":"P-9","name":"虎狼痢","displayName":"虎狼痢","kana":"ころり","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rarity":1,"type":2,"level":6,"color":16,"term":0,"trait":0,"power":null,"legacy":5,"anyNumCopies":false,"orderTable":221,"orderDeck":353},</text:p>
          </table:table-cell>
          <table:table-cell table:number-columns-repeated="16356"/>
        </table:table-row>
        <table:table-row table:style-name="ro2">
          <table:table-cell table:style-name="ce11" office:value-type="float" office:value="222" calcext:value-type="float">
            <text:p>222</text:p>
          </table:table-cell>
          <table:table-cell table:style-name="ce11" office:value-type="float" office:value="345" calcext:value-type="float">
            <text:p>345</text:p>
          </table:table-cell>
          <table:table-cell table:style-name="ce21" office:value-type="string" calcext:value-type="string">
            <text:p>P-10</text:p>
          </table:table-cell>
          <table:table-cell table:style-name="ce21" office:value-type="float" office:value="10" calcext:value-type="float">
            <text:p>10</text:p>
          </table:table-cell>
          <table:table-cell table:style-name="ce11" office:value-type="string" calcext:value-type="string">
            <text:p>浪士集う長屋</text:p>
          </table:table-cell>
          <table:table-cell table:style-name="ce11" table:formula="of:=[.E223]" office:value-type="string" office:string-value="浪士集う長屋" calcext:value-type="string">
            <text:p>浪士集う長屋</text:p>
          </table:table-cell>
          <table:table-cell table:style-name="ce11" office:value-type="string" calcext:value-type="string">
            <text:p>ろうしつどうながや</text:p>
          </table:table-cell>
          <table:table-cell table:style-name="ce11" office:value-type="string" calcext:value-type="string">
            <text:p>発展する医療デッキ</text:p>
          </table:table-cell>
          <table:table-cell table:style-name="ce11" table:formula="of:=VLOOKUP([.H223];[$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2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23];[$種類番号.$A$1:$種類番号.$B$4];2;0)" office:value-type="float" office:value="2" calcext:value-type="float">
            <text:p>2</text:p>
          </table:table-cell>
          <table:table-cell table:style-name="ce11" office:value-type="string" calcext:value-type="string">
            <text:p>紫</text:p>
          </table:table-cell>
          <table:table-cell table:style-name="ce11" table:formula="of:=VLOOKUP([.N223];[$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23];[$特性番号.$A$1:$特性番号.$B$8];2;0);0)" office:value-type="float" office:value="0" calcext:value-type="float">
            <text:p>0</text:p>
          </table:table-cell>
          <table:table-cell table:style-name="ce11"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style-name="ce11" table:formula="of:=NA()" office:value-type="string" office:string-value="" calcext:value-type="error">
            <text:p>#N/A</text:p>
          </table:table-cell>
          <table:table-cell table:style-name="ce27" table:formula="of:=NA()" office:value-type="string" office:string-value="" calcext:value-type="error">
            <text:p>#N/A</text:p>
          </table:table-cell>
          <table:table-cell table:style-name="ce11" table:formula="of:=IFERROR(VLOOKUP([.$X22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0.png</text:p>
          </table:table-cell>
          <table:table-cell table:style-name="ce11" table:formula="of:=CONCATENATE([$JSON.$A$1];[.$C223];[$JSON.$B$1];[.$E223];[$JSON.$C$1];[.F223];[$JSON.$D$1];[.$G223];[$JSON.$E$1];IF(ISNA([.$T223]);&quot;null&quot;;&quot;&quot;&quot;&quot;&amp;[.$T223]&amp;&quot;&quot;&quot;&quot;);[$JSON.$F$1];[.$V223];[$JSON.$G$1];IF(ISNA([.$X223]);&quot;null&quot;;&quot;&quot;&quot;&quot;&amp;[.$X223]&amp;&quot;&quot;&quot;&quot;);[$JSON.$H$1];[.$AA223];[$JSON.$I$1];[.$I223];[$JSON.$J$1];[.K223];[$JSON.$K$1];[.$M223];[$JSON.$L$1];[.$P223];[$JSON.$M$1];[.$O223];[$JSON.$N$1];[.$S223];[$JSON.$O$1];[.$U223];[$JSON.$P$1];IF(ISNA([.$W223]);&quot;null&quot;;[.$W223]);[$JSON.$Q$1];[.$Y223];[$JSON.$R$1];IF([.$Z223];&quot;true&quot;;&quot;false&quot;);[$JSON.$S$1];[.$A223];[$JSON.$T$1];[.$B223];[$JSON.$U$1])" office:value-type="string" office:string-value="{&quot;id&quot;:&quot;P-10&quot;,&quot;name&quot;:&quot;浪士集う長屋&quot;,&quot;displayName&quot;:&quot;浪士集う長屋&quot;,&quot;kana&quot;:&quot;ろうしつどうながや&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rarity&quot;:1,&quot;type&quot;:2,&quot;level&quot;:5,&quot;color&quot;:16,&quot;term&quot;:0,&quot;trait&quot;:0,&quot;power&quot;:null,&quot;legacy&quot;:0,&quot;anyNumCopies&quot;:false,&quot;orderTable&quot;:222,&quot;orderDeck&quot;:345}," calcext:value-type="string">
            <text:p>{"id":"P-10","name":"浪士集う長屋","displayName":"浪士集う長屋","kana":"ろうしつどうながや","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rarity":1,"type":2,"level":5,"color":16,"term":0,"trait":0,"power":null,"legacy":0,"anyNumCopies":false,"orderTable":222,"orderDeck":345},</text:p>
          </table:table-cell>
          <table:table-cell table:number-columns-repeated="16356"/>
        </table:table-row>
        <table:table-row table:style-name="ro2">
          <table:table-cell table:style-name="ce11" office:value-type="float" office:value="223" calcext:value-type="float">
            <text:p>223</text:p>
          </table:table-cell>
          <table:table-cell table:style-name="ce11" office:value-type="float" office:value="365" calcext:value-type="float">
            <text:p>365</text:p>
          </table:table-cell>
          <table:table-cell table:style-name="ce21" office:value-type="string" calcext:value-type="string">
            <text:p>P-11</text:p>
          </table:table-cell>
          <table:table-cell table:style-name="ce21" office:value-type="float" office:value="11" calcext:value-type="float">
            <text:p>11</text:p>
          </table:table-cell>
          <table:table-cell table:style-name="ce11" office:value-type="string" calcext:value-type="string">
            <text:p>スピリットアウェイ</text:p>
          </table:table-cell>
          <table:table-cell table:style-name="ce11" table:formula="of:=[.E224]" office:value-type="string" office:string-value="スピリットアウェイ" calcext:value-type="string">
            <text:p>スピリットアウェイ</text:p>
          </table:table-cell>
          <table:table-cell table:style-name="ce11" office:value-type="string" calcext:value-type="string">
            <text:p>すぴりっとあうぇい</text:p>
          </table:table-cell>
          <table:table-cell table:style-name="ce11" office:value-type="string" calcext:value-type="string">
            <text:p>発展する医療デッキ</text:p>
          </table:table-cell>
          <table:table-cell table:style-name="ce11" table:formula="of:=VLOOKUP([.H224];[$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2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24];[$種類番号.$A$1:$種類番号.$B$4];2;0)" office:value-type="float" office:value="3" calcext:value-type="float">
            <text:p>3</text:p>
          </table:table-cell>
          <table:table-cell table:style-name="ce11" office:value-type="string" calcext:value-type="string">
            <text:p>紫</text:p>
          </table:table-cell>
          <table:table-cell table:style-name="ce11" table:formula="of:=VLOOKUP([.N224];[$色番号.$A$1:$色番号.$B$10];2;0)" office:value-type="float" office:value="16" calcext:value-type="float">
            <text:p>16</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2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24];[$特性番号.$A$1:$特性番号.$B$8];2;0);0)" office:value-type="float" office:value="0" calcext:value-type="float">
            <text:p>0</text:p>
          </table:table-cell>
          <table:table-cell table:style-name="ce11" office:value-type="string" calcext:value-type="string">
            <text:p>自分の戦場のガーディアン1体を手札に戻して、相手の山札の上から2枚を墓地に置いて、マリョク配置権+1する。</text:p>
          </table:table-cell>
          <table:table-cell table:style-name="ce11" table:formula="of:=NA()" office:value-type="string" office:string-value="" calcext:value-type="error">
            <text:p>#N/A</text:p>
          </table:table-cell>
          <table:table-cell table:style-name="ce27" office:value-type="string" calcext:value-type="string">
            <text:p>魔力化</text:p>
          </table:table-cell>
          <table:table-cell table:style-name="ce11" table:formula="of:=IFERROR(VLOOKUP([.$X224];[$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1.png</text:p>
          </table:table-cell>
          <table:table-cell table:style-name="ce11" table:formula="of:=CONCATENATE([$JSON.$A$1];[.$C224];[$JSON.$B$1];[.$E224];[$JSON.$C$1];[.F224];[$JSON.$D$1];[.$G224];[$JSON.$E$1];IF(ISNA([.$T224]);&quot;null&quot;;&quot;&quot;&quot;&quot;&amp;[.$T224]&amp;&quot;&quot;&quot;&quot;);[$JSON.$F$1];[.$V224];[$JSON.$G$1];IF(ISNA([.$X224]);&quot;null&quot;;&quot;&quot;&quot;&quot;&amp;[.$X224]&amp;&quot;&quot;&quot;&quot;);[$JSON.$H$1];[.$AA224];[$JSON.$I$1];[.$I224];[$JSON.$J$1];[.K224];[$JSON.$K$1];[.$M224];[$JSON.$L$1];[.$P224];[$JSON.$M$1];[.$O224];[$JSON.$N$1];[.$S224];[$JSON.$O$1];[.$U224];[$JSON.$P$1];IF(ISNA([.$W224]);&quot;null&quot;;[.$W224]);[$JSON.$Q$1];[.$Y224];[$JSON.$R$1];IF([.$Z224];&quot;true&quot;;&quot;false&quot;);[$JSON.$S$1];[.$A224];[$JSON.$T$1];[.$B224];[$JSON.$U$1])" office:value-type="string" office:string-value="{&quot;id&quot;:&quot;P-11&quot;,&quot;name&quot;:&quot;スピリットアウェイ&quot;,&quot;displayName&quot;:&quot;スピリットアウェイ&quot;,&quot;kana&quot;:&quot;すぴりっとあうぇい&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rarity&quot;:1,&quot;type&quot;:3,&quot;level&quot;:1,&quot;color&quot;:16,&quot;term&quot;:0,&quot;trait&quot;:0,&quot;power&quot;:null,&quot;legacy&quot;:1,&quot;anyNumCopies&quot;:false,&quot;orderTable&quot;:223,&quot;orderDeck&quot;:365}," calcext:value-type="string">
            <text:p>{"id":"P-11","name":"スピリットアウェイ","displayName":"スピリットアウェイ","kana":"すぴりっとあうぇい","traitText":null,"ruleText":"自分の戦場のガーディアン1体を手札に戻して、相手の山札の上から2枚を墓地に置いて、マリョク配置権+1する。","legacyText":"魔力化","imageUrl":"https://one-draw.jp/ijinden/cardlist/P01/card/03_P_011.png","expansion":30,"rarity":1,"type":3,"level":1,"color":16,"term":0,"trait":0,"power":null,"legacy":1,"anyNumCopies":false,"orderTable":223,"orderDeck":365},</text:p>
          </table:table-cell>
          <table:table-cell table:number-columns-repeated="16356"/>
        </table:table-row>
        <table:table-row table:style-name="ro2">
          <table:table-cell table:style-name="ce11" office:value-type="float" office:value="224" calcext:value-type="float">
            <text:p>224</text:p>
          </table:table-cell>
          <table:table-cell table:style-name="ce11" office:value-type="float" office:value="410" calcext:value-type="float">
            <text:p>410</text:p>
          </table:table-cell>
          <table:table-cell table:style-name="ce21" office:value-type="string" calcext:value-type="string">
            <text:p>P-12</text:p>
          </table:table-cell>
          <table:table-cell table:style-name="ce21" office:value-type="float" office:value="12" calcext:value-type="float">
            <text:p>12</text:p>
          </table:table-cell>
          <table:table-cell table:style-name="ce11" office:value-type="string" calcext:value-type="string">
            <text:p>タイムディレイション</text:p>
          </table:table-cell>
          <table:table-cell table:style-name="ce11" table:formula="of:=[.E225]" office:value-type="string" office:string-value="タイムディレイション" calcext:value-type="string">
            <text:p>タイムディレイション</text:p>
          </table:table-cell>
          <table:table-cell table:style-name="ce11" office:value-type="string" calcext:value-type="string">
            <text:p>たいむでぃれいしょん</text:p>
          </table:table-cell>
          <table:table-cell table:style-name="ce11" office:value-type="string" calcext:value-type="string">
            <text:p>発展する医療デッキ</text:p>
          </table:table-cell>
          <table:table-cell table:style-name="ce11" table:formula="of:=VLOOKUP([.H225];[$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2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25];[$種類番号.$A$1:$種類番号.$B$4];2;0)" office:value-type="float" office:value="3" calcext:value-type="float">
            <text:p>3</text:p>
          </table:table-cell>
          <table:table-cell table:style-name="ce11" office:value-type="string" calcext:value-type="string">
            <text:p>紫</text:p>
          </table:table-cell>
          <table:table-cell table:style-name="ce11" table:formula="of:=VLOOKUP([.N225];[$色番号.$A$1:$色番号.$B$10];2;0)" office:value-type="float" office:value="16" calcext:value-type="float">
            <text:p>16</text:p>
          </table:table-cell>
          <table:table-cell table:style-name="ce11" office:value-type="float" office:value="4" calcext:value-type="float">
            <text:p>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2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25];[$特性番号.$A$1:$特性番号.$B$8];2;0);0)" office:value-type="float" office:value="0" calcext:value-type="float">
            <text:p>0</text:p>
          </table:table-cell>
          <table:table-cell table:style-name="ce11" office:value-type="string" calcext:value-type="string">
            <text:p>これを裏にして魔力ゾーンに置く。その後バトルを中断する。ターンプレイヤーは残りのフェイズを行わずにターンを終了する。</text:p>
          </table:table-cell>
          <table:table-cell table:style-name="ce11" table:formula="of:=NA()" office:value-type="string" office:string-value="" calcext:value-type="error">
            <text:p>#N/A</text:p>
          </table:table-cell>
          <table:table-cell table:style-name="ce27" office:value-type="string" calcext:value-type="string">
            <text:p>冥府発動</text:p>
          </table:table-cell>
          <table:table-cell table:style-name="ce11" table:formula="of:=IFERROR(VLOOKUP([.$X22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2.png</text:p>
          </table:table-cell>
          <table:table-cell table:style-name="ce11" table:formula="of:=CONCATENATE([$JSON.$A$1];[.$C225];[$JSON.$B$1];[.$E225];[$JSON.$C$1];[.F225];[$JSON.$D$1];[.$G225];[$JSON.$E$1];IF(ISNA([.$T225]);&quot;null&quot;;&quot;&quot;&quot;&quot;&amp;[.$T225]&amp;&quot;&quot;&quot;&quot;);[$JSON.$F$1];[.$V225];[$JSON.$G$1];IF(ISNA([.$X225]);&quot;null&quot;;&quot;&quot;&quot;&quot;&amp;[.$X225]&amp;&quot;&quot;&quot;&quot;);[$JSON.$H$1];[.$AA225];[$JSON.$I$1];[.$I225];[$JSON.$J$1];[.K225];[$JSON.$K$1];[.$M225];[$JSON.$L$1];[.$P225];[$JSON.$M$1];[.$O225];[$JSON.$N$1];[.$S225];[$JSON.$O$1];[.$U225];[$JSON.$P$1];IF(ISNA([.$W225]);&quot;null&quot;;[.$W225]);[$JSON.$Q$1];[.$Y225];[$JSON.$R$1];IF([.$Z225];&quot;true&quot;;&quot;false&quot;);[$JSON.$S$1];[.$A225];[$JSON.$T$1];[.$B225];[$JSON.$U$1])" office:value-type="string" office:string-value="{&quot;id&quot;:&quot;P-12&quot;,&quot;name&quot;:&quot;タイムディレイション&quot;,&quot;displayName&quot;:&quot;タイムディレイション&quot;,&quot;kana&quot;:&quot;たいむでぃれいしょん&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rarity&quot;:1,&quot;type&quot;:3,&quot;level&quot;:4,&quot;color&quot;:16,&quot;term&quot;:0,&quot;trait&quot;:0,&quot;power&quot;:null,&quot;legacy&quot;:2,&quot;anyNumCopies&quot;:false,&quot;orderTable&quot;:224,&quot;orderDeck&quot;:410}," calcext:value-type="string">
            <text:p>{"id":"P-12","name":"タイムディレイション","displayName":"タイムディレイション","kana":"たいむでぃれいしょん","traitText":null,"ruleText":"これを裏にして魔力ゾーンに置く。その後バトルを中断する。ターンプレイヤーは残りのフェイズを行わずにターンを終了する。","legacyText":"冥府発動","imageUrl":"https://one-draw.jp/ijinden/cardlist/P01/card/03_P_012.png","expansion":30,"rarity":1,"type":3,"level":4,"color":16,"term":0,"trait":0,"power":null,"legacy":2,"anyNumCopies":false,"orderTable":224,"orderDeck":410},</text:p>
          </table:table-cell>
          <table:table-cell table:number-columns-repeated="16356"/>
        </table:table-row>
        <table:table-row table:style-name="ro2">
          <table:table-cell table:style-name="ce11" office:value-type="float" office:value="225" calcext:value-type="float">
            <text:p>225</text:p>
          </table:table-cell>
          <table:table-cell table:style-name="ce11" office:value-type="float" office:value="462" calcext:value-type="float">
            <text:p>462</text:p>
          </table:table-cell>
          <table:table-cell table:style-name="ce21" office:value-type="string" calcext:value-type="string">
            <text:p>P-13</text:p>
          </table:table-cell>
          <table:table-cell table:style-name="ce21" office:value-type="float" office:value="13" calcext:value-type="float">
            <text:p>13</text:p>
          </table:table-cell>
          <table:table-cell table:style-name="ce11" office:value-type="string" calcext:value-type="string">
            <text:p>ハンドミラー</text:p>
          </table:table-cell>
          <table:table-cell table:style-name="ce11" table:formula="of:=[.E226]" office:value-type="string" office:string-value="ハンドミラー" calcext:value-type="string">
            <text:p>ハンドミラー</text:p>
          </table:table-cell>
          <table:table-cell table:style-name="ce11" office:value-type="string" calcext:value-type="string">
            <text:p>はんどみらー</text:p>
          </table:table-cell>
          <table:table-cell table:style-name="ce11" office:value-type="string" calcext:value-type="string">
            <text:p>発展する医療デッキ</text:p>
          </table:table-cell>
          <table:table-cell table:style-name="ce11" table:formula="of:=VLOOKUP([.H226];[$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2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6];[$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26];[$特性番号.$A$1:$特性番号.$B$8];2;0);0)" office:value-type="float" office:value="0" calcext:value-type="float">
            <text:p>0</text:p>
          </table:table-cell>
          <table:table-cell table:style-name="ce11" office:value-type="string" calcext:value-type="string">
            <text:p>魔力ゾーンに置かれたとき、1ドローする。</text:p>
          </table:table-cell>
          <table:table-cell table:style-name="ce11" table:formula="of:=NA()" office:value-type="string" office:string-value="" calcext:value-type="error">
            <text:p>#N/A</text:p>
          </table:table-cell>
          <table:table-cell table:style-name="ce27" table:formula="of:=NA()" office:value-type="string" office:string-value="" calcext:value-type="error">
            <text:p>#N/A</text:p>
          </table:table-cell>
          <table:table-cell table:style-name="ce11" table:formula="of:=IFERROR(VLOOKUP([.$X22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3.png</text:p>
          </table:table-cell>
          <table:table-cell table:style-name="ce11" table:formula="of:=CONCATENATE([$JSON.$A$1];[.$C226];[$JSON.$B$1];[.$E226];[$JSON.$C$1];[.F226];[$JSON.$D$1];[.$G226];[$JSON.$E$1];IF(ISNA([.$T226]);&quot;null&quot;;&quot;&quot;&quot;&quot;&amp;[.$T226]&amp;&quot;&quot;&quot;&quot;);[$JSON.$F$1];[.$V226];[$JSON.$G$1];IF(ISNA([.$X226]);&quot;null&quot;;&quot;&quot;&quot;&quot;&amp;[.$X226]&amp;&quot;&quot;&quot;&quot;);[$JSON.$H$1];[.$AA226];[$JSON.$I$1];[.$I226];[$JSON.$J$1];[.K226];[$JSON.$K$1];[.$M226];[$JSON.$L$1];[.$P226];[$JSON.$M$1];[.$O226];[$JSON.$N$1];[.$S226];[$JSON.$O$1];[.$U226];[$JSON.$P$1];IF(ISNA([.$W226]);&quot;null&quot;;[.$W226]);[$JSON.$Q$1];[.$Y226];[$JSON.$R$1];IF([.$Z226];&quot;true&quot;;&quot;false&quot;);[$JSON.$S$1];[.$A226];[$JSON.$T$1];[.$B226];[$JSON.$U$1])" office:value-type="string" office:string-value="{&quot;id&quot;:&quot;P-13&quot;,&quot;name&quot;:&quot;ハンドミラー&quot;,&quot;displayName&quot;:&quot;ハンドミラー&quot;,&quot;kana&quot;:&quot;はんどみらー&quot;,&quot;traitText&quot;:null,&quot;ruleText&quot;:&quot;魔力ゾーンに置かれたとき、1ドローする。&quot;,&quot;legacyText&quot;:null,&quot;imageUrl&quot;:&quot;https://one-draw.jp/ijinden/cardlist/P01/card/03_P_013.png&quot;,&quot;expansion&quot;:30,&quot;rarity&quot;:1,&quot;type&quot;:4,&quot;level&quot;:1,&quot;color&quot;:16,&quot;term&quot;:0,&quot;trait&quot;:0,&quot;power&quot;:null,&quot;legacy&quot;:0,&quot;anyNumCopies&quot;:false,&quot;orderTable&quot;:225,&quot;orderDeck&quot;:462}," calcext:value-type="string">
            <text:p>{"id":"P-13","name":"ハンドミラー","displayName":"ハンドミラー","kana":"はんどみらー","traitText":null,"ruleText":"魔力ゾーンに置かれたとき、1ドローする。","legacyText":null,"imageUrl":"https://one-draw.jp/ijinden/cardlist/P01/card/03_P_013.png","expansion":30,"rarity":1,"type":4,"level":1,"color":16,"term":0,"trait":0,"power":null,"legacy":0,"anyNumCopies":false,"orderTable":225,"orderDeck":462},</text:p>
          </table:table-cell>
          <table:table-cell table:number-columns-repeated="16356"/>
        </table:table-row>
        <table:table-row table:style-name="ro2">
          <table:table-cell table:style-name="ce11" office:value-type="float" office:value="226" calcext:value-type="float">
            <text:p>226</text:p>
          </table:table-cell>
          <table:table-cell table:style-name="ce11" office:value-type="float" office:value="463" calcext:value-type="float">
            <text:p>463</text:p>
          </table:table-cell>
          <table:table-cell table:style-name="ce21" office:value-type="string" calcext:value-type="string">
            <text:p>P-14</text:p>
          </table:table-cell>
          <table:table-cell table:style-name="ce21" office:value-type="float" office:value="14" calcext:value-type="float">
            <text:p>14</text:p>
          </table:table-cell>
          <table:table-cell table:style-name="ce11" office:value-type="string" calcext:value-type="string">
            <text:p>ブラックブレイド</text:p>
          </table:table-cell>
          <table:table-cell table:style-name="ce11" table:formula="of:=[.E227]" office:value-type="string" office:string-value="ブラックブレイド" calcext:value-type="string">
            <text:p>ブラックブレイド</text:p>
          </table:table-cell>
          <table:table-cell table:style-name="ce11" office:value-type="string" calcext:value-type="string">
            <text:p>ぶらっくぶれいど</text:p>
          </table:table-cell>
          <table:table-cell table:style-name="ce11" office:value-type="string" calcext:value-type="string">
            <text:p>発展する医療デッキ</text:p>
          </table:table-cell>
          <table:table-cell table:style-name="ce11" table:formula="of:=VLOOKUP([.H227];[$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2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7];[$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7];[$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27];[$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7];[$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4.png</text:p>
          </table:table-cell>
          <table:table-cell table:style-name="ce11" table:formula="of:=CONCATENATE([$JSON.$A$1];[.$C227];[$JSON.$B$1];[.$E227];[$JSON.$C$1];[.F227];[$JSON.$D$1];[.$G227];[$JSON.$E$1];IF(ISNA([.$T227]);&quot;null&quot;;&quot;&quot;&quot;&quot;&amp;[.$T227]&amp;&quot;&quot;&quot;&quot;);[$JSON.$F$1];[.$V227];[$JSON.$G$1];IF(ISNA([.$X227]);&quot;null&quot;;&quot;&quot;&quot;&quot;&amp;[.$X227]&amp;&quot;&quot;&quot;&quot;);[$JSON.$H$1];[.$AA227];[$JSON.$I$1];[.$I227];[$JSON.$J$1];[.K227];[$JSON.$K$1];[.$M227];[$JSON.$L$1];[.$P227];[$JSON.$M$1];[.$O227];[$JSON.$N$1];[.$S227];[$JSON.$O$1];[.$U227];[$JSON.$P$1];IF(ISNA([.$W227]);&quot;null&quot;;[.$W227]);[$JSON.$Q$1];[.$Y227];[$JSON.$R$1];IF([.$Z227];&quot;true&quot;;&quot;false&quot;);[$JSON.$S$1];[.$A227];[$JSON.$T$1];[.$B227];[$JSON.$U$1])" office:value-type="string" office:string-value="{&quot;id&quot;:&quot;P-14&quot;,&quot;name&quot;:&quot;ブラックブレイド&quot;,&quot;displayName&quot;:&quot;ブラックブレイド&quot;,&quot;kana&quot;:&quot;ぶらっくぶれいど&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rarity&quot;:1,&quot;type&quot;:4,&quot;level&quot;:1,&quot;color&quot;:16,&quot;term&quot;:0,&quot;trait&quot;:0,&quot;power&quot;:null,&quot;legacy&quot;:3,&quot;anyNumCopies&quot;:false,&quot;orderTable&quot;:226,&quot;orderDeck&quot;:463}," calcext:value-type="string">
            <text:p>{"id":"P-14","name":"ブラックブレイド","displayName":"ブラックブレイド","kana":"ぶらっくぶれいど","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rarity":1,"type":4,"level":1,"color":16,"term":0,"trait":0,"power":null,"legacy":3,"anyNumCopies":false,"orderTable":226,"orderDeck":463},</text:p>
          </table:table-cell>
          <table:table-cell table:number-columns-repeated="16356"/>
        </table:table-row>
        <table:table-row table:style-name="ro2">
          <table:table-cell table:style-name="ce11" office:value-type="float" office:value="227" calcext:value-type="float">
            <text:p>227</text:p>
          </table:table-cell>
          <table:table-cell table:style-name="ce11" office:value-type="float" office:value="486" calcext:value-type="float">
            <text:p>486</text:p>
          </table:table-cell>
          <table:table-cell table:style-name="ce21" office:value-type="string" calcext:value-type="string">
            <text:p>P-15</text:p>
          </table:table-cell>
          <table:table-cell table:style-name="ce21" office:value-type="float" office:value="15" calcext:value-type="float">
            <text:p>15</text:p>
          </table:table-cell>
          <table:table-cell table:style-name="ce11" office:value-type="string" calcext:value-type="string">
            <text:p>パープルオーブ</text:p>
          </table:table-cell>
          <table:table-cell table:style-name="ce11" office:value-type="string" calcext:value-type="string">
            <text:p>パープルオーブ (スターター)</text:p>
          </table:table-cell>
          <table:table-cell table:style-name="ce11" office:value-type="string" calcext:value-type="string">
            <text:p>ぱーぷるおーぶ</text:p>
          </table:table-cell>
          <table:table-cell table:style-name="ce11" office:value-type="string" calcext:value-type="string">
            <text:p>発展する医療デッキ</text:p>
          </table:table-cell>
          <table:table-cell table:style-name="ce11" table:formula="of:=VLOOKUP([.H228];[$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2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8];[$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28];[$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P01/card/03_P_015.png</text:p>
          </table:table-cell>
          <table:table-cell table:style-name="ce11" table:formula="of:=CONCATENATE([$JSON.$A$1];[.$C228];[$JSON.$B$1];[.$E228];[$JSON.$C$1];[.F228];[$JSON.$D$1];[.$G228];[$JSON.$E$1];IF(ISNA([.$T228]);&quot;null&quot;;&quot;&quot;&quot;&quot;&amp;[.$T228]&amp;&quot;&quot;&quot;&quot;);[$JSON.$F$1];[.$V228];[$JSON.$G$1];IF(ISNA([.$X228]);&quot;null&quot;;&quot;&quot;&quot;&quot;&amp;[.$X228]&amp;&quot;&quot;&quot;&quot;);[$JSON.$H$1];[.$AA228];[$JSON.$I$1];[.$I228];[$JSON.$J$1];[.K228];[$JSON.$K$1];[.$M228];[$JSON.$L$1];[.$P228];[$JSON.$M$1];[.$O228];[$JSON.$N$1];[.$S228];[$JSON.$O$1];[.$U228];[$JSON.$P$1];IF(ISNA([.$W228]);&quot;null&quot;;[.$W228]);[$JSON.$Q$1];[.$Y228];[$JSON.$R$1];IF([.$Z228];&quot;true&quot;;&quot;false&quot;);[$JSON.$S$1];[.$A228];[$JSON.$T$1];[.$B228];[$JSON.$U$1])" office:value-type="string" office:string-value="{&quot;id&quot;:&quot;P-15&quot;,&quot;name&quot;:&quot;パープルオーブ&quot;,&quot;displayName&quot;:&quot;パープルオーブ (スターター)&quot;,&quot;kana&quot;:&quot;ぱーぷるおーぶ&quot;,&quot;traitText&quot;:null,&quot;ruleText&quot;:&quot;&quot;,&quot;legacyText&quot;:&quot;復元&quot;,&quot;imageUrl&quot;:&quot;https://one-draw.jp/ijinden/cardlist/P01/card/03_P_015.png&quot;,&quot;expansion&quot;:30,&quot;rarity&quot;:1,&quot;type&quot;:4,&quot;level&quot;:2,&quot;color&quot;:16,&quot;term&quot;:0,&quot;trait&quot;:0,&quot;power&quot;:null,&quot;legacy&quot;:3,&quot;anyNumCopies&quot;:false,&quot;orderTable&quot;:227,&quot;orderDeck&quot;:486}," calcext:value-type="string">
            <text:p>{"id":"P-15","name":"パープルオーブ","displayName":"パープルオーブ (スターター)","kana":"ぱーぷるおーぶ","traitText":null,"ruleText":"","legacyText":"復元","imageUrl":"https://one-draw.jp/ijinden/cardlist/P01/card/03_P_015.png","expansion":30,"rarity":1,"type":4,"level":2,"color":16,"term":0,"trait":0,"power":null,"legacy":3,"anyNumCopies":false,"orderTable":227,"orderDeck":486},</text:p>
          </table:table-cell>
          <table:table-cell table:number-columns-repeated="16356"/>
        </table:table-row>
        <table:table-row table:style-name="ro2">
          <table:table-cell table:style-name="ce11" office:value-type="float" office:value="228" calcext:value-type="float">
            <text:p>228</text:p>
          </table:table-cell>
          <table:table-cell table:style-name="ce11" office:value-type="float" office:value="464" calcext:value-type="float">
            <text:p>464</text:p>
          </table:table-cell>
          <table:table-cell table:style-name="ce21" office:value-type="string" calcext:value-type="string">
            <text:p>P-16</text:p>
          </table:table-cell>
          <table:table-cell table:style-name="ce21" office:value-type="float" office:value="16" calcext:value-type="float">
            <text:p>16</text:p>
          </table:table-cell>
          <table:table-cell table:style-name="ce11" office:value-type="string" calcext:value-type="string">
            <text:p>パープルストーン</text:p>
          </table:table-cell>
          <table:table-cell table:style-name="ce11" office:value-type="string" calcext:value-type="string">
            <text:p>パープルストーン (スターター)</text:p>
          </table:table-cell>
          <table:table-cell table:style-name="ce11" office:value-type="string" calcext:value-type="string">
            <text:p>ぱーぷるすとーん</text:p>
          </table:table-cell>
          <table:table-cell table:style-name="ce11" office:value-type="string" calcext:value-type="string">
            <text:p>発展する医療デッキ</text:p>
          </table:table-cell>
          <table:table-cell table:style-name="ce11" table:formula="of:=VLOOKUP([.H229];[$収録番号.$A$1:$収録番号.$B$10];2;0)" office:value-type="float" office:value="30" calcext:value-type="float">
            <text:p>30</text:p>
          </table:table-cell>
          <table:table-cell table:style-name="ce11" office:value-type="string" calcext:value-type="string">
            <text:p>N</text:p>
          </table:table-cell>
          <table:table-cell table:style-name="ce11" table:formula="of:=VLOOKUP([.J22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229];[$種類番号.$A$1:$種類番号.$B$4];2;0)" office:value-type="float" office:value="4" calcext:value-type="float">
            <text:p>4</text:p>
          </table:table-cell>
          <table:table-cell table:style-name="ce11" office:value-type="string" calcext:value-type="string">
            <text:p>紫</text:p>
          </table:table-cell>
          <table:table-cell table:style-name="ce11" table:formula="of:=VLOOKUP([.N229];[$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2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29];[$特性番号.$A$1:$特性番号.$B$8];2;0);0)" office:value-type="float" office:value="0" calcext:value-type="float">
            <text:p>0</text:p>
          </table:table-cell>
          <table:table-cell table:style-name="ce11" office:value-type="string" calcext:value-type="string">
            <text:p>※デッキに何枚でも入れてよ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229];[$遺業能力番号.$A$1:$遺業能力番号.$B$9];2;0);0)" office:value-type="float" office:value="3" calcext:value-type="float">
            <text:p>3</text:p>
          </table:table-cell>
          <table:table-cell table:style-name="ce28" office:value-type="boolean" office:boolean-value="true" calcext:value-type="boolean">
            <text:p>TRUE</text:p>
          </table:table-cell>
          <table:table-cell table:style-name="ce11" office:value-type="string" calcext:value-type="string">
            <text:p>https://one-draw.jp/ijinden/cardlist/P01/card/03_P_016.png</text:p>
          </table:table-cell>
          <table:table-cell table:style-name="ce11" table:formula="of:=CONCATENATE([$JSON.$A$1];[.$C229];[$JSON.$B$1];[.$E229];[$JSON.$C$1];[.F229];[$JSON.$D$1];[.$G229];[$JSON.$E$1];IF(ISNA([.$T229]);&quot;null&quot;;&quot;&quot;&quot;&quot;&amp;[.$T229]&amp;&quot;&quot;&quot;&quot;);[$JSON.$F$1];[.$V229];[$JSON.$G$1];IF(ISNA([.$X229]);&quot;null&quot;;&quot;&quot;&quot;&quot;&amp;[.$X229]&amp;&quot;&quot;&quot;&quot;);[$JSON.$H$1];[.$AA229];[$JSON.$I$1];[.$I229];[$JSON.$J$1];[.K229];[$JSON.$K$1];[.$M229];[$JSON.$L$1];[.$P229];[$JSON.$M$1];[.$O229];[$JSON.$N$1];[.$S229];[$JSON.$O$1];[.$U229];[$JSON.$P$1];IF(ISNA([.$W229]);&quot;null&quot;;[.$W229]);[$JSON.$Q$1];[.$Y229];[$JSON.$R$1];IF([.$Z229];&quot;true&quot;;&quot;false&quot;);[$JSON.$S$1];[.$A229];[$JSON.$T$1];[.$B229];[$JSON.$U$1])" office:value-type="string" office:string-value="{&quot;id&quot;:&quot;P-16&quot;,&quot;name&quot;:&quot;パープルストーン&quot;,&quot;displayName&quot;:&quot;パープルストーン (スターター)&quot;,&quot;kana&quot;:&quot;ぱーぷるすとーん&quot;,&quot;traitText&quot;:null,&quot;ruleText&quot;:&quot;※デッキに何枚でも入れてよい。&quot;,&quot;legacyText&quot;:&quot;復元&quot;,&quot;imageUrl&quot;:&quot;https://one-draw.jp/ijinden/cardlist/P01/card/03_P_016.png&quot;,&quot;expansion&quot;:30,&quot;rarity&quot;:1,&quot;type&quot;:4,&quot;level&quot;:1,&quot;color&quot;:16,&quot;term&quot;:0,&quot;trait&quot;:0,&quot;power&quot;:null,&quot;legacy&quot;:3,&quot;anyNumCopies&quot;:true,&quot;orderTable&quot;:228,&quot;orderDeck&quot;:464}," calcext:value-type="string">
            <text:p>{"id":"P-16","name":"パープルストーン","displayName":"パープルストーン (スターター)","kana":"ぱーぷるすとーん","traitText":null,"ruleText":"※デッキに何枚でも入れてよい。","legacyText":"復元","imageUrl":"https://one-draw.jp/ijinden/cardlist/P01/card/03_P_016.png","expansion":30,"rarity":1,"type":4,"level":1,"color":16,"term":0,"trait":0,"power":null,"legacy":3,"anyNumCopies":true,"orderTable":228,"orderDeck":464},</text:p>
          </table:table-cell>
          <table:table-cell table:number-columns-repeated="16356"/>
        </table:table-row>
        <table:table-row table:style-name="ro2">
          <table:table-cell table:style-name="ce11" office:value-type="float" office:value="229" calcext:value-type="float">
            <text:p>229</text:p>
          </table:table-cell>
          <table:table-cell table:style-name="ce11" office:value-type="float" office:value="188" calcext:value-type="float">
            <text:p>188</text:p>
          </table:table-cell>
          <table:table-cell table:style-name="ce21" office:value-type="string" calcext:value-type="string">
            <text:p>3-1</text:p>
          </table:table-cell>
          <table:table-cell table:style-name="ce21" office:value-type="float" office:value="1" calcext:value-type="float">
            <text:p>1</text:p>
          </table:table-cell>
          <table:table-cell table:style-name="ce11" office:value-type="string" calcext:value-type="string">
            <text:p>宮本武蔵</text:p>
          </table:table-cell>
          <table:table-cell table:style-name="ce11" table:formula="of:=[.E230]" office:value-type="string" office:string-value="宮本武蔵" calcext:value-type="string">
            <text:p>宮本武蔵</text:p>
          </table:table-cell>
          <table:table-cell table:style-name="ce11" office:value-type="string" calcext:value-type="string">
            <text:p>みやもとむさし</text:p>
          </table:table-cell>
          <table:table-cell table:style-name="ce11" office:value-type="string" calcext:value-type="string">
            <text:p>第３弾ブースターパック</text:p>
          </table:table-cell>
          <table:table-cell table:style-name="ce11" table:formula="of:=VLOOKUP([.H230];[$収録番号.$A$1:$収録番号.$B$10];2;0)" office:value-type="float" office:value="35" calcext:value-type="float">
            <text:p>35</text:p>
          </table:table-cell>
          <table:table-cell table:style-name="ce11" office:value-type="string" calcext:value-type="string">
            <text:p>SR</text:p>
          </table:table-cell>
          <table:table-cell table:style-name="ce11" table:formula="of:=VLOOKUP([.J230];[$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0];[$種類番号.$A$1:$種類番号.$B$4];2;0)" office:value-type="float" office:value="1" calcext:value-type="float">
            <text:p>1</text:p>
          </table:table-cell>
          <table:table-cell table:style-name="ce11" office:value-type="string" calcext:value-type="string">
            <text:p>赤</text:p>
          </table:table-cell>
          <table:table-cell table:style-name="ce11" table:formula="of:=VLOOKUP([.N230];[$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0];[$能力語番号.$A$1:$能力語番号.$B$11];2;0);0)" office:value-type="float" office:value="0" calcext:value-type="float">
            <text:p>0</text:p>
          </table:table-cell>
          <table:table-cell office:value-type="string" calcext:value-type="string">
            <text:p>剣術</text:p>
          </table:table-cell>
          <table:table-cell table:style-name="ce11" table:formula="of:=IFERROR(VLOOKUP([.$T230];[$特性番号.$A$1:$特性番号.$B$8];2;0);0)" office:value-type="float" office:value="1" calcext:value-type="float">
            <text:p>1</text:p>
          </table:table-cell>
          <table:table-cell table:style-name="ce11"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23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1.png</text:p>
          </table:table-cell>
          <table:table-cell table:style-name="ce11" table:formula="of:=CONCATENATE([$JSON.$A$1];[.$C230];[$JSON.$B$1];[.$E230];[$JSON.$C$1];[.F230];[$JSON.$D$1];[.$G230];[$JSON.$E$1];IF(ISNA([.$T230]);&quot;null&quot;;&quot;&quot;&quot;&quot;&amp;[.$T230]&amp;&quot;&quot;&quot;&quot;);[$JSON.$F$1];[.$V230];[$JSON.$G$1];IF(ISNA([.$X230]);&quot;null&quot;;&quot;&quot;&quot;&quot;&amp;[.$X230]&amp;&quot;&quot;&quot;&quot;);[$JSON.$H$1];[.$AA230];[$JSON.$I$1];[.$I230];[$JSON.$J$1];[.K230];[$JSON.$K$1];[.$M230];[$JSON.$L$1];[.$P230];[$JSON.$M$1];[.$O230];[$JSON.$N$1];[.$S230];[$JSON.$O$1];[.$U230];[$JSON.$P$1];IF(ISNA([.$W230]);&quot;null&quot;;[.$W230]);[$JSON.$Q$1];[.$Y230];[$JSON.$R$1];IF([.$Z230];&quot;true&quot;;&quot;false&quot;);[$JSON.$S$1];[.$A230];[$JSON.$T$1];[.$B230];[$JSON.$U$1])" office:value-type="string" office:string-value="{&quot;id&quot;:&quot;3-1&quot;,&quot;name&quot;:&quot;宮本武蔵&quot;,&quot;displayName&quot;:&quot;宮本武蔵&quot;,&quot;kana&quot;:&quot;みやもとむさし&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rarity&quot;:4,&quot;type&quot;:1,&quot;level&quot;:5,&quot;color&quot;:1,&quot;term&quot;:0,&quot;trait&quot;:1,&quot;power&quot;:4000,&quot;legacy&quot;:0,&quot;anyNumCopies&quot;:false,&quot;orderTable&quot;:229,&quot;orderDeck&quot;:188}," calcext:value-type="string">
            <text:p>{"id":"3-1","name":"宮本武蔵","displayName":"宮本武蔵","kana":"みやもとむさし","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rarity":4,"type":1,"level":5,"color":1,"term":0,"trait":1,"power":4000,"legacy":0,"anyNumCopies":false,"orderTable":229,"orderDeck":188},</text:p>
          </table:table-cell>
          <table:table-cell table:number-columns-repeated="16356"/>
        </table:table-row>
        <table:table-row table:style-name="ro2">
          <table:table-cell table:style-name="ce11" office:value-type="float" office:value="230" calcext:value-type="float">
            <text:p>230</text:p>
          </table:table-cell>
          <table:table-cell table:style-name="ce11" office:value-type="float" office:value="140" calcext:value-type="float">
            <text:p>140</text:p>
          </table:table-cell>
          <table:table-cell table:style-name="ce21" office:value-type="string" calcext:value-type="string">
            <text:p>3-2</text:p>
          </table:table-cell>
          <table:table-cell table:style-name="ce21" office:value-type="float" office:value="2" calcext:value-type="float">
            <text:p>2</text:p>
          </table:table-cell>
          <table:table-cell table:style-name="ce11" office:value-type="string" calcext:value-type="string">
            <text:p>エリザベス1世</text:p>
          </table:table-cell>
          <table:table-cell table:style-name="ce11" table:formula="of:=[.E231]" office:value-type="string" office:string-value="エリザベス1世" calcext:value-type="string">
            <text:p>エリザベス1世</text:p>
          </table:table-cell>
          <table:table-cell table:style-name="ce11" office:value-type="string" calcext:value-type="string">
            <text:p>えりざべすいっせい</text:p>
          </table:table-cell>
          <table:table-cell table:style-name="ce11" office:value-type="string" calcext:value-type="string">
            <text:p>第３弾ブースターパック</text:p>
          </table:table-cell>
          <table:table-cell table:style-name="ce11" table:formula="of:=VLOOKUP([.H231];[$収録番号.$A$1:$収録番号.$B$10];2;0)" office:value-type="float" office:value="35" calcext:value-type="float">
            <text:p>35</text:p>
          </table:table-cell>
          <table:table-cell table:style-name="ce11" office:value-type="string" calcext:value-type="string">
            <text:p>SR</text:p>
          </table:table-cell>
          <table:table-cell table:style-name="ce11" table:formula="of:=VLOOKUP([.J23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1];[$種類番号.$A$1:$種類番号.$B$4];2;0)" office:value-type="float" office:value="1" calcext:value-type="float">
            <text:p>1</text:p>
          </table:table-cell>
          <table:table-cell table:style-name="ce11" office:value-type="string" calcext:value-type="string">
            <text:p>赤</text:p>
          </table:table-cell>
          <table:table-cell table:style-name="ce11" table:formula="of:=VLOOKUP([.N231];[$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31];[$特性番号.$A$1:$特性番号.$B$8];2;0);0)" office:value-type="float" office:value="0" calcext:value-type="float">
            <text:p>0</text:p>
          </table:table-cell>
          <table:table-cell table:style-name="ce11"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231];[$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2.png</text:p>
          </table:table-cell>
          <table:table-cell table:style-name="ce11" table:formula="of:=CONCATENATE([$JSON.$A$1];[.$C231];[$JSON.$B$1];[.$E231];[$JSON.$C$1];[.F231];[$JSON.$D$1];[.$G231];[$JSON.$E$1];IF(ISNA([.$T231]);&quot;null&quot;;&quot;&quot;&quot;&quot;&amp;[.$T231]&amp;&quot;&quot;&quot;&quot;);[$JSON.$F$1];[.$V231];[$JSON.$G$1];IF(ISNA([.$X231]);&quot;null&quot;;&quot;&quot;&quot;&quot;&amp;[.$X231]&amp;&quot;&quot;&quot;&quot;);[$JSON.$H$1];[.$AA231];[$JSON.$I$1];[.$I231];[$JSON.$J$1];[.K231];[$JSON.$K$1];[.$M231];[$JSON.$L$1];[.$P231];[$JSON.$M$1];[.$O231];[$JSON.$N$1];[.$S231];[$JSON.$O$1];[.$U231];[$JSON.$P$1];IF(ISNA([.$W231]);&quot;null&quot;;[.$W231]);[$JSON.$Q$1];[.$Y231];[$JSON.$R$1];IF([.$Z231];&quot;true&quot;;&quot;false&quot;);[$JSON.$S$1];[.$A231];[$JSON.$T$1];[.$B231];[$JSON.$U$1])" office:value-type="string" office:string-value="{&quot;id&quot;:&quot;3-2&quot;,&quot;name&quot;:&quot;エリザベス1世&quot;,&quot;displayName&quot;:&quot;エリザベス1世&quot;,&quot;kana&quot;:&quot;えりざべすいっせい&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rarity&quot;:4,&quot;type&quot;:1,&quot;level&quot;:4,&quot;color&quot;:1,&quot;term&quot;:0,&quot;trait&quot;:0,&quot;power&quot;:2000,&quot;legacy&quot;:6,&quot;anyNumCopies&quot;:false,&quot;orderTable&quot;:230,&quot;orderDeck&quot;:140}," calcext:value-type="string">
            <text:p>{"id":"3-2","name":"エリザベス1世","displayName":"エリザベス1世","kana":"えりざべすいっせい","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rarity":4,"type":1,"level":4,"color":1,"term":0,"trait":0,"power":2000,"legacy":6,"anyNumCopies":false,"orderTable":230,"orderDeck":140},</text:p>
          </table:table-cell>
          <table:table-cell table:number-columns-repeated="16356"/>
        </table:table-row>
        <table:table-row table:style-name="ro2">
          <table:table-cell table:style-name="ce11" office:value-type="float" office:value="231" calcext:value-type="float">
            <text:p>231</text:p>
          </table:table-cell>
          <table:table-cell table:style-name="ce11" office:value-type="float" office:value="262" calcext:value-type="float">
            <text:p>262</text:p>
          </table:table-cell>
          <table:table-cell table:style-name="ce21" office:value-type="string" calcext:value-type="string">
            <text:p>3-3</text:p>
          </table:table-cell>
          <table:table-cell table:style-name="ce21" office:value-type="float" office:value="3" calcext:value-type="float">
            <text:p>3</text:p>
          </table:table-cell>
          <table:table-cell table:style-name="ce11" office:value-type="string" calcext:value-type="string">
            <text:p>エンリケ航海王子</text:p>
          </table:table-cell>
          <table:table-cell table:style-name="ce11" table:formula="of:=[.E232]" office:value-type="string" office:string-value="エンリケ航海王子" calcext:value-type="string">
            <text:p>エンリケ航海王子</text:p>
          </table:table-cell>
          <table:table-cell table:style-name="ce11" office:value-type="string" calcext:value-type="string">
            <text:p>えんりけこうかいおうじ</text:p>
          </table:table-cell>
          <table:table-cell table:style-name="ce11" office:value-type="string" calcext:value-type="string">
            <text:p>第３弾ブースターパック</text:p>
          </table:table-cell>
          <table:table-cell table:style-name="ce11" table:formula="of:=VLOOKUP([.H232];[$収録番号.$A$1:$収録番号.$B$10];2;0)" office:value-type="float" office:value="35" calcext:value-type="float">
            <text:p>35</text:p>
          </table:table-cell>
          <table:table-cell table:style-name="ce11" office:value-type="string" calcext:value-type="string">
            <text:p>SR</text:p>
          </table:table-cell>
          <table:table-cell table:style-name="ce11" table:formula="of:=VLOOKUP([.J23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32];[$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32];[$特性番号.$A$1:$特性番号.$B$8];2;0);0)" office:value-type="float" office:value="0" calcext:value-type="float">
            <text:p>0</text:p>
          </table:table-cell>
          <table:table-cell table:style-name="ce11"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23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3.png</text:p>
          </table:table-cell>
          <table:table-cell table:style-name="ce11" table:formula="of:=CONCATENATE([$JSON.$A$1];[.$C232];[$JSON.$B$1];[.$E232];[$JSON.$C$1];[.F232];[$JSON.$D$1];[.$G232];[$JSON.$E$1];IF(ISNA([.$T232]);&quot;null&quot;;&quot;&quot;&quot;&quot;&amp;[.$T232]&amp;&quot;&quot;&quot;&quot;);[$JSON.$F$1];[.$V232];[$JSON.$G$1];IF(ISNA([.$X232]);&quot;null&quot;;&quot;&quot;&quot;&quot;&amp;[.$X232]&amp;&quot;&quot;&quot;&quot;);[$JSON.$H$1];[.$AA232];[$JSON.$I$1];[.$I232];[$JSON.$J$1];[.K232];[$JSON.$K$1];[.$M232];[$JSON.$L$1];[.$P232];[$JSON.$M$1];[.$O232];[$JSON.$N$1];[.$S232];[$JSON.$O$1];[.$U232];[$JSON.$P$1];IF(ISNA([.$W232]);&quot;null&quot;;[.$W232]);[$JSON.$Q$1];[.$Y232];[$JSON.$R$1];IF([.$Z232];&quot;true&quot;;&quot;false&quot;);[$JSON.$S$1];[.$A232];[$JSON.$T$1];[.$B232];[$JSON.$U$1])" office:value-type="string" office:string-value="{&quot;id&quot;:&quot;3-3&quot;,&quot;name&quot;:&quot;エンリケ航海王子&quot;,&quot;displayName&quot;:&quot;エンリケ航海王子&quot;,&quot;kana&quot;:&quot;えんりけこうかいおうじ&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rarity&quot;:4,&quot;type&quot;:1,&quot;level&quot;:7,&quot;color&quot;:2,&quot;term&quot;:0,&quot;trait&quot;:0,&quot;power&quot;:5000,&quot;legacy&quot;:4,&quot;anyNumCopies&quot;:false,&quot;orderTable&quot;:231,&quot;orderDeck&quot;:262}," calcext:value-type="string">
            <text:p>{"id":"3-3","name":"エンリケ航海王子","displayName":"エンリケ航海王子","kana":"えんりけこうかいおうじ","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rarity":4,"type":1,"level":7,"color":2,"term":0,"trait":0,"power":5000,"legacy":4,"anyNumCopies":false,"orderTable":231,"orderDeck":262},</text:p>
          </table:table-cell>
          <table:table-cell table:number-columns-repeated="16356"/>
        </table:table-row>
        <table:table-row table:style-name="ro2">
          <table:table-cell table:style-name="ce11" office:value-type="float" office:value="232" calcext:value-type="float">
            <text:p>232</text:p>
          </table:table-cell>
          <table:table-cell table:style-name="ce11" office:value-type="float" office:value="201" calcext:value-type="float">
            <text:p>201</text:p>
          </table:table-cell>
          <table:table-cell table:style-name="ce21" office:value-type="string" calcext:value-type="string">
            <text:p>3-4</text:p>
          </table:table-cell>
          <table:table-cell table:style-name="ce21" office:value-type="float" office:value="4" calcext:value-type="float">
            <text:p>4</text:p>
          </table:table-cell>
          <table:table-cell table:style-name="ce11" office:value-type="string" calcext:value-type="string">
            <text:p>吉田松陰</text:p>
          </table:table-cell>
          <table:table-cell table:style-name="ce11" table:formula="of:=[.E233]" office:value-type="string" office:string-value="吉田松陰" calcext:value-type="string">
            <text:p>吉田松陰</text:p>
          </table:table-cell>
          <table:table-cell table:style-name="ce11" office:value-type="string" calcext:value-type="string">
            <text:p>よしだしょういん</text:p>
          </table:table-cell>
          <table:table-cell table:style-name="ce11" office:value-type="string" calcext:value-type="string">
            <text:p>第３弾ブースターパック</text:p>
          </table:table-cell>
          <table:table-cell table:style-name="ce11" table:formula="of:=VLOOKUP([.H233];[$収録番号.$A$1:$収録番号.$B$10];2;0)" office:value-type="float" office:value="35" calcext:value-type="float">
            <text:p>35</text:p>
          </table:table-cell>
          <table:table-cell table:style-name="ce11" office:value-type="string" calcext:value-type="string">
            <text:p>SR</text:p>
          </table:table-cell>
          <table:table-cell table:style-name="ce11" table:formula="of:=VLOOKUP([.J23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3];[$種類番号.$A$1:$種類番号.$B$4];2;0)" office:value-type="float" office:value="1" calcext:value-type="float">
            <text:p>1</text:p>
          </table:table-cell>
          <table:table-cell table:style-name="ce11" office:value-type="string" calcext:value-type="string">
            <text:p>青</text:p>
          </table:table-cell>
          <table:table-cell table:style-name="ce11" table:formula="of:=VLOOKUP([.N23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3];[$能力語番号.$A$1:$能力語番号.$B$11];2;0);0)" office:value-type="float" office:value="0" calcext:value-type="float">
            <text:p>0</text:p>
          </table:table-cell>
          <table:table-cell office:value-type="string" calcext:value-type="string">
            <text:p>思想</text:p>
          </table:table-cell>
          <table:table-cell table:style-name="ce11" table:formula="of:=IFERROR(VLOOKUP([.$T233];[$特性番号.$A$1:$特性番号.$B$8];2;0);0)" office:value-type="float" office:value="8" calcext:value-type="float">
            <text:p>8</text:p>
          </table:table-cell>
          <table:table-cell table:style-name="ce11" office:value-type="string" calcext:value-type="string">
            <text:p>これが戦場にいる間「決起」は発動しない。¶起きているイジンが相手の戦場にいる間、自分の戦場の「思想」イジンは「ダブルプレッシャー」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3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4.png</text:p>
          </table:table-cell>
          <table:table-cell table:style-name="ce11" table:formula="of:=CONCATENATE([$JSON.$A$1];[.$C233];[$JSON.$B$1];[.$E233];[$JSON.$C$1];[.F233];[$JSON.$D$1];[.$G233];[$JSON.$E$1];IF(ISNA([.$T233]);&quot;null&quot;;&quot;&quot;&quot;&quot;&amp;[.$T233]&amp;&quot;&quot;&quot;&quot;);[$JSON.$F$1];[.$V233];[$JSON.$G$1];IF(ISNA([.$X233]);&quot;null&quot;;&quot;&quot;&quot;&quot;&amp;[.$X233]&amp;&quot;&quot;&quot;&quot;);[$JSON.$H$1];[.$AA233];[$JSON.$I$1];[.$I233];[$JSON.$J$1];[.K233];[$JSON.$K$1];[.$M233];[$JSON.$L$1];[.$P233];[$JSON.$M$1];[.$O233];[$JSON.$N$1];[.$S233];[$JSON.$O$1];[.$U233];[$JSON.$P$1];IF(ISNA([.$W233]);&quot;null&quot;;[.$W233]);[$JSON.$Q$1];[.$Y233];[$JSON.$R$1];IF([.$Z233];&quot;true&quot;;&quot;false&quot;);[$JSON.$S$1];[.$A233];[$JSON.$T$1];[.$B233];[$JSON.$U$1])" office:value-type="string" office:string-value="{&quot;id&quot;:&quot;3-4&quot;,&quot;name&quot;:&quot;吉田松陰&quot;,&quot;displayName&quot;:&quot;吉田松陰&quot;,&quot;kana&quot;:&quot;よしだしょういん&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rarity&quot;:4,&quot;type&quot;:1,&quot;level&quot;:5,&quot;color&quot;:2,&quot;term&quot;:0,&quot;trait&quot;:8,&quot;power&quot;:2000,&quot;legacy&quot;:4,&quot;anyNumCopies&quot;:false,&quot;orderTable&quot;:232,&quot;orderDeck&quot;:201}," calcext:value-type="string">
            <text:p>{"id":"3-4","name":"吉田松陰","displayName":"吉田松陰","kana":"よしだしょういん","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rarity":4,"type":1,"level":5,"color":2,"term":0,"trait":8,"power":2000,"legacy":4,"anyNumCopies":false,"orderTable":232,"orderDeck":201},</text:p>
          </table:table-cell>
          <table:table-cell table:number-columns-repeated="16356"/>
        </table:table-row>
        <table:table-row table:style-name="ro2">
          <table:table-cell table:style-name="ce11" office:value-type="float" office:value="233" calcext:value-type="float">
            <text:p>233</text:p>
          </table:table-cell>
          <table:table-cell table:style-name="ce11" office:value-type="float" office:value="211" calcext:value-type="float">
            <text:p>211</text:p>
          </table:table-cell>
          <table:table-cell table:style-name="ce21" office:value-type="string" calcext:value-type="string">
            <text:p>3-5</text:p>
          </table:table-cell>
          <table:table-cell table:style-name="ce21" office:value-type="float" office:value="5" calcext:value-type="float">
            <text:p>5</text:p>
          </table:table-cell>
          <table:table-cell table:style-name="ce11" office:value-type="string" calcext:value-type="string">
            <text:p>徳川光圀</text:p>
          </table:table-cell>
          <table:table-cell table:style-name="ce11" table:formula="of:=[.E234]" office:value-type="string" office:string-value="徳川光圀" calcext:value-type="string">
            <text:p>徳川光圀</text:p>
          </table:table-cell>
          <table:table-cell table:style-name="ce11" office:value-type="string" calcext:value-type="string">
            <text:p>とくがわみつくに</text:p>
          </table:table-cell>
          <table:table-cell table:style-name="ce11" office:value-type="string" calcext:value-type="string">
            <text:p>第３弾ブースターパック</text:p>
          </table:table-cell>
          <table:table-cell table:style-name="ce11" table:formula="of:=VLOOKUP([.H234];[$収録番号.$A$1:$収録番号.$B$10];2;0)" office:value-type="float" office:value="35" calcext:value-type="float">
            <text:p>35</text:p>
          </table:table-cell>
          <table:table-cell table:style-name="ce11" office:value-type="string" calcext:value-type="string">
            <text:p>SR</text:p>
          </table:table-cell>
          <table:table-cell table:style-name="ce11" table:formula="of:=VLOOKUP([.J23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234];[$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4];[$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234];[$特性番号.$A$1:$特性番号.$B$8];2;0);0)" office:value-type="float" office:value="0" calcext:value-type="float">
            <text:p>0</text:p>
          </table:table-cell>
          <table:table-cell table:style-name="ce11"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table:style-name="ce11" office:value-type="float" office:value="4000" calcext:value-type="float">
            <text:p>4000</text:p>
          </table:table-cell>
          <table:table-cell table:style-name="ce25" office:value-type="string" calcext:value-type="string">
            <text:p>木霊</text:p>
          </table:table-cell>
          <table:table-cell table:style-name="ce11" table:formula="of:=IFERROR(VLOOKUP([.$X234];[$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5.png</text:p>
          </table:table-cell>
          <table:table-cell table:style-name="ce11" table:formula="of:=CONCATENATE([$JSON.$A$1];[.$C234];[$JSON.$B$1];[.$E234];[$JSON.$C$1];[.F234];[$JSON.$D$1];[.$G234];[$JSON.$E$1];IF(ISNA([.$T234]);&quot;null&quot;;&quot;&quot;&quot;&quot;&amp;[.$T234]&amp;&quot;&quot;&quot;&quot;);[$JSON.$F$1];[.$V234];[$JSON.$G$1];IF(ISNA([.$X234]);&quot;null&quot;;&quot;&quot;&quot;&quot;&amp;[.$X234]&amp;&quot;&quot;&quot;&quot;);[$JSON.$H$1];[.$AA234];[$JSON.$I$1];[.$I234];[$JSON.$J$1];[.K234];[$JSON.$K$1];[.$M234];[$JSON.$L$1];[.$P234];[$JSON.$M$1];[.$O234];[$JSON.$N$1];[.$S234];[$JSON.$O$1];[.$U234];[$JSON.$P$1];IF(ISNA([.$W234]);&quot;null&quot;;[.$W234]);[$JSON.$Q$1];[.$Y234];[$JSON.$R$1];IF([.$Z234];&quot;true&quot;;&quot;false&quot;);[$JSON.$S$1];[.$A234];[$JSON.$T$1];[.$B234];[$JSON.$U$1])" office:value-type="string" office:string-value="{&quot;id&quot;:&quot;3-5&quot;,&quot;name&quot;:&quot;徳川光圀&quot;,&quot;displayName&quot;:&quot;徳川光圀&quot;,&quot;kana&quot;:&quot;とくがわみつくに&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rarity&quot;:4,&quot;type&quot;:1,&quot;level&quot;:5,&quot;color&quot;:4,&quot;term&quot;:2,&quot;trait&quot;:0,&quot;power&quot;:4000,&quot;legacy&quot;:8,&quot;anyNumCopies&quot;:false,&quot;orderTable&quot;:233,&quot;orderDeck&quot;:211}," calcext:value-type="string">
            <text:p>{"id":"3-5","name":"徳川光圀","displayName":"徳川光圀","kana":"とくがわみつくに","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rarity":4,"type":1,"level":5,"color":4,"term":2,"trait":0,"power":4000,"legacy":8,"anyNumCopies":false,"orderTable":233,"orderDeck":211},</text:p>
          </table:table-cell>
          <table:table-cell table:number-columns-repeated="16356"/>
        </table:table-row>
        <table:table-row table:style-name="ro2">
          <table:table-cell table:style-name="ce11" office:value-type="float" office:value="234" calcext:value-type="float">
            <text:p>234</text:p>
          </table:table-cell>
          <table:table-cell table:style-name="ce11" office:value-type="float" office:value="268" calcext:value-type="float">
            <text:p>268</text:p>
          </table:table-cell>
          <table:table-cell table:style-name="ce21" office:value-type="string" calcext:value-type="string">
            <text:p>3-6</text:p>
          </table:table-cell>
          <table:table-cell table:style-name="ce21" office:value-type="float" office:value="6" calcext:value-type="float">
            <text:p>6</text:p>
          </table:table-cell>
          <table:table-cell table:style-name="ce11" office:value-type="string" calcext:value-type="string">
            <text:p>葛飾応為</text:p>
          </table:table-cell>
          <table:table-cell table:style-name="ce11" table:formula="of:=[.E235]" office:value-type="string" office:string-value="葛飾応為" calcext:value-type="string">
            <text:p>葛飾応為</text:p>
          </table:table-cell>
          <table:table-cell table:style-name="ce11" office:value-type="string" calcext:value-type="string">
            <text:p>かつしかおうい</text:p>
          </table:table-cell>
          <table:table-cell table:style-name="ce11" office:value-type="string" calcext:value-type="string">
            <text:p>第３弾ブースターパック</text:p>
          </table:table-cell>
          <table:table-cell table:style-name="ce11" table:formula="of:=VLOOKUP([.H235];[$収録番号.$A$1:$収録番号.$B$10];2;0)" office:value-type="float" office:value="35" calcext:value-type="float">
            <text:p>35</text:p>
          </table:table-cell>
          <table:table-cell table:style-name="ce11" office:value-type="string" calcext:value-type="string">
            <text:p>SR</text:p>
          </table:table-cell>
          <table:table-cell table:style-name="ce11" table:formula="of:=VLOOKUP([.J23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235];[$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5];[$能力語番号.$A$1:$能力語番号.$B$11];2;0);0)" office:value-type="float" office:value="0" calcext:value-type="float">
            <text:p>0</text:p>
          </table:table-cell>
          <table:table-cell office:value-type="string" calcext:value-type="string">
            <text:p>美術</text:p>
          </table:table-cell>
          <table:table-cell table:style-name="ce11" table:formula="of:=IFERROR(VLOOKUP([.$T235];[$特性番号.$A$1:$特性番号.$B$8];2;0);0)" office:value-type="float" office:value="2" calcext:value-type="float">
            <text:p>2</text:p>
          </table:table-cell>
          <table:table-cell table:style-name="ce11"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23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6.png</text:p>
          </table:table-cell>
          <table:table-cell table:style-name="ce11" table:formula="of:=CONCATENATE([$JSON.$A$1];[.$C235];[$JSON.$B$1];[.$E235];[$JSON.$C$1];[.F235];[$JSON.$D$1];[.$G235];[$JSON.$E$1];IF(ISNA([.$T235]);&quot;null&quot;;&quot;&quot;&quot;&quot;&amp;[.$T235]&amp;&quot;&quot;&quot;&quot;);[$JSON.$F$1];[.$V235];[$JSON.$G$1];IF(ISNA([.$X235]);&quot;null&quot;;&quot;&quot;&quot;&quot;&amp;[.$X235]&amp;&quot;&quot;&quot;&quot;);[$JSON.$H$1];[.$AA235];[$JSON.$I$1];[.$I235];[$JSON.$J$1];[.K235];[$JSON.$K$1];[.$M235];[$JSON.$L$1];[.$P235];[$JSON.$M$1];[.$O235];[$JSON.$N$1];[.$S235];[$JSON.$O$1];[.$U235];[$JSON.$P$1];IF(ISNA([.$W235]);&quot;null&quot;;[.$W235]);[$JSON.$Q$1];[.$Y235];[$JSON.$R$1];IF([.$Z235];&quot;true&quot;;&quot;false&quot;);[$JSON.$S$1];[.$A235];[$JSON.$T$1];[.$B235];[$JSON.$U$1])" office:value-type="string" office:string-value="{&quot;id&quot;:&quot;3-6&quot;,&quot;name&quot;:&quot;葛飾応為&quot;,&quot;displayName&quot;:&quot;葛飾応為&quot;,&quot;kana&quot;:&quot;かつしかおうい&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rarity&quot;:4,&quot;type&quot;:1,&quot;level&quot;:7,&quot;color&quot;:4,&quot;term&quot;:0,&quot;trait&quot;:2,&quot;power&quot;:6000,&quot;legacy&quot;:1,&quot;anyNumCopies&quot;:false,&quot;orderTable&quot;:234,&quot;orderDeck&quot;:268}," calcext:value-type="string">
            <text:p>{"id":"3-6","name":"葛飾応為","displayName":"葛飾応為","kana":"かつしかおうい","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rarity":4,"type":1,"level":7,"color":4,"term":0,"trait":2,"power":6000,"legacy":1,"anyNumCopies":false,"orderTable":234,"orderDeck":268},</text:p>
          </table:table-cell>
          <table:table-cell table:number-columns-repeated="16356"/>
        </table:table-row>
        <table:table-row table:style-name="ro2">
          <table:table-cell table:style-name="ce11" office:value-type="float" office:value="235" calcext:value-type="float">
            <text:p>235</text:p>
          </table:table-cell>
          <table:table-cell table:style-name="ce11" office:value-type="float" office:value="217" calcext:value-type="float">
            <text:p>217</text:p>
          </table:table-cell>
          <table:table-cell table:style-name="ce21" office:value-type="string" calcext:value-type="string">
            <text:p>3-7</text:p>
          </table:table-cell>
          <table:table-cell table:style-name="ce21" office:value-type="float" office:value="7" calcext:value-type="float">
            <text:p>7</text:p>
          </table:table-cell>
          <table:table-cell table:style-name="ce11" office:value-type="string" calcext:value-type="string">
            <text:p>曹丕</text:p>
          </table:table-cell>
          <table:table-cell table:style-name="ce11" table:formula="of:=[.E236]" office:value-type="string" office:string-value="曹丕" calcext:value-type="string">
            <text:p>曹丕</text:p>
          </table:table-cell>
          <table:table-cell table:style-name="ce11" office:value-type="string" calcext:value-type="string">
            <text:p>そうひ</text:p>
          </table:table-cell>
          <table:table-cell table:style-name="ce11" office:value-type="string" calcext:value-type="string">
            <text:p>第３弾ブースターパック</text:p>
          </table:table-cell>
          <table:table-cell table:style-name="ce11" table:formula="of:=VLOOKUP([.H236];[$収録番号.$A$1:$収録番号.$B$10];2;0)" office:value-type="float" office:value="35" calcext:value-type="float">
            <text:p>35</text:p>
          </table:table-cell>
          <table:table-cell table:style-name="ce11" office:value-type="string" calcext:value-type="string">
            <text:p>SR</text:p>
          </table:table-cell>
          <table:table-cell table:style-name="ce11" table:formula="of:=VLOOKUP([.J23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6];[$種類番号.$A$1:$種類番号.$B$4];2;0)" office:value-type="float" office:value="1" calcext:value-type="float">
            <text:p>1</text:p>
          </table:table-cell>
          <table:table-cell table:style-name="ce11" office:value-type="string" calcext:value-type="string">
            <text:p>黄</text:p>
          </table:table-cell>
          <table:table-cell table:style-name="ce11" table:formula="of:=VLOOKUP([.N236];[$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6];[$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236];[$特性番号.$A$1:$特性番号.$B$8];2;0);0)" office:value-type="float" office:value="0" calcext:value-type="float">
            <text:p>0</text:p>
          </table:table-cell>
          <table:table-cell table:style-name="ce11"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23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7.png</text:p>
          </table:table-cell>
          <table:table-cell table:style-name="ce11" table:formula="of:=CONCATENATE([$JSON.$A$1];[.$C236];[$JSON.$B$1];[.$E236];[$JSON.$C$1];[.F236];[$JSON.$D$1];[.$G236];[$JSON.$E$1];IF(ISNA([.$T236]);&quot;null&quot;;&quot;&quot;&quot;&quot;&amp;[.$T236]&amp;&quot;&quot;&quot;&quot;);[$JSON.$F$1];[.$V236];[$JSON.$G$1];IF(ISNA([.$X236]);&quot;null&quot;;&quot;&quot;&quot;&quot;&amp;[.$X236]&amp;&quot;&quot;&quot;&quot;);[$JSON.$H$1];[.$AA236];[$JSON.$I$1];[.$I236];[$JSON.$J$1];[.K236];[$JSON.$K$1];[.$M236];[$JSON.$L$1];[.$P236];[$JSON.$M$1];[.$O236];[$JSON.$N$1];[.$S236];[$JSON.$O$1];[.$U236];[$JSON.$P$1];IF(ISNA([.$W236]);&quot;null&quot;;[.$W236]);[$JSON.$Q$1];[.$Y236];[$JSON.$R$1];IF([.$Z236];&quot;true&quot;;&quot;false&quot;);[$JSON.$S$1];[.$A236];[$JSON.$T$1];[.$B236];[$JSON.$U$1])" office:value-type="string" office:string-value="{&quot;id&quot;:&quot;3-7&quot;,&quot;name&quot;:&quot;曹丕&quot;,&quot;displayName&quot;:&quot;曹丕&quot;,&quot;kana&quot;:&quot;そうひ&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rarity&quot;:4,&quot;type&quot;:1,&quot;level&quot;:5,&quot;color&quot;:8,&quot;term&quot;:2,&quot;trait&quot;:0,&quot;power&quot;:4000,&quot;legacy&quot;:0,&quot;anyNumCopies&quot;:false,&quot;orderTable&quot;:235,&quot;orderDeck&quot;:217}," calcext:value-type="string">
            <text:p>{"id":"3-7","name":"曹丕","displayName":"曹丕","kana":"そうひ","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rarity":4,"type":1,"level":5,"color":8,"term":2,"trait":0,"power":4000,"legacy":0,"anyNumCopies":false,"orderTable":235,"orderDeck":217},</text:p>
          </table:table-cell>
          <table:table-cell table:number-columns-repeated="16356"/>
        </table:table-row>
        <table:table-row table:style-name="ro2">
          <table:table-cell table:style-name="ce11" office:value-type="float" office:value="236" calcext:value-type="float">
            <text:p>236</text:p>
          </table:table-cell>
          <table:table-cell table:style-name="ce11" office:value-type="float" office:value="287" calcext:value-type="float">
            <text:p>287</text:p>
          </table:table-cell>
          <table:table-cell table:style-name="ce21" office:value-type="string" calcext:value-type="string">
            <text:p>3-8</text:p>
          </table:table-cell>
          <table:table-cell table:style-name="ce21" office:value-type="float" office:value="8" calcext:value-type="float">
            <text:p>8</text:p>
          </table:table-cell>
          <table:table-cell table:style-name="ce11" office:value-type="string" calcext:value-type="string">
            <text:p>ジェーン・オースティン</text:p>
          </table:table-cell>
          <table:table-cell table:style-name="ce11" table:formula="of:=[.E237]" office:value-type="string" office:string-value="ジェーン・オースティン" calcext:value-type="string">
            <text:p>ジェーン・オースティン</text:p>
          </table:table-cell>
          <table:table-cell table:style-name="ce11" office:value-type="string" calcext:value-type="string">
            <text:p>じぇーんおーすてぃん</text:p>
          </table:table-cell>
          <table:table-cell table:style-name="ce11" office:value-type="string" calcext:value-type="string">
            <text:p>第３弾ブースターパック</text:p>
          </table:table-cell>
          <table:table-cell table:style-name="ce11" table:formula="of:=VLOOKUP([.H237];[$収録番号.$A$1:$収録番号.$B$10];2;0)" office:value-type="float" office:value="35" calcext:value-type="float">
            <text:p>35</text:p>
          </table:table-cell>
          <table:table-cell table:style-name="ce11" office:value-type="string" calcext:value-type="string">
            <text:p>SR</text:p>
          </table:table-cell>
          <table:table-cell table:style-name="ce11" table:formula="of:=VLOOKUP([.J23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7];[$種類番号.$A$1:$種類番号.$B$4];2;0)" office:value-type="float" office:value="1" calcext:value-type="float">
            <text:p>1</text:p>
          </table:table-cell>
          <table:table-cell table:style-name="ce11" office:value-type="string" calcext:value-type="string">
            <text:p>黄</text:p>
          </table:table-cell>
          <table:table-cell table:style-name="ce11" table:formula="of:=VLOOKUP([.N237];[$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37];[$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237];[$特性番号.$A$1:$特性番号.$B$8];2;0);0)" office:value-type="float" office:value="0" calcext:value-type="float">
            <text:p>0</text:p>
          </table:table-cell>
          <table:table-cell table:style-name="ce11"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table:style-name="ce11" office:value-type="float" office:value="4000" calcext:value-type="float">
            <text:p>4000</text:p>
          </table:table-cell>
          <table:table-cell table:style-name="ce25" office:value-type="string" calcext:value-type="string">
            <text:p>魔力化</text:p>
          </table:table-cell>
          <table:table-cell table:style-name="ce11" table:formula="of:=IFERROR(VLOOKUP([.$X23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8.png</text:p>
          </table:table-cell>
          <table:table-cell table:style-name="ce11" table:formula="of:=CONCATENATE([$JSON.$A$1];[.$C237];[$JSON.$B$1];[.$E237];[$JSON.$C$1];[.F237];[$JSON.$D$1];[.$G237];[$JSON.$E$1];IF(ISNA([.$T237]);&quot;null&quot;;&quot;&quot;&quot;&quot;&amp;[.$T237]&amp;&quot;&quot;&quot;&quot;);[$JSON.$F$1];[.$V237];[$JSON.$G$1];IF(ISNA([.$X237]);&quot;null&quot;;&quot;&quot;&quot;&quot;&amp;[.$X237]&amp;&quot;&quot;&quot;&quot;);[$JSON.$H$1];[.$AA237];[$JSON.$I$1];[.$I237];[$JSON.$J$1];[.K237];[$JSON.$K$1];[.$M237];[$JSON.$L$1];[.$P237];[$JSON.$M$1];[.$O237];[$JSON.$N$1];[.$S237];[$JSON.$O$1];[.$U237];[$JSON.$P$1];IF(ISNA([.$W237]);&quot;null&quot;;[.$W237]);[$JSON.$Q$1];[.$Y237];[$JSON.$R$1];IF([.$Z237];&quot;true&quot;;&quot;false&quot;);[$JSON.$S$1];[.$A237];[$JSON.$T$1];[.$B237];[$JSON.$U$1])" office:value-type="string" office:string-value="{&quot;id&quot;:&quot;3-8&quot;,&quot;name&quot;:&quot;ジェーン・オースティン&quot;,&quot;displayName&quot;:&quot;ジェーン・オースティン&quot;,&quot;kana&quot;:&quot;じぇーんおーすてぃん&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rarity&quot;:4,&quot;type&quot;:1,&quot;level&quot;:8,&quot;color&quot;:8,&quot;term&quot;:2,&quot;trait&quot;:0,&quot;power&quot;:4000,&quot;legacy&quot;:1,&quot;anyNumCopies&quot;:false,&quot;orderTable&quot;:236,&quot;orderDeck&quot;:287}," calcext:value-type="string">
            <text:p>{"id":"3-8","name":"ジェーン・オースティン","displayName":"ジェーン・オースティン","kana":"じぇーんおーすてぃん","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rarity":4,"type":1,"level":8,"color":8,"term":2,"trait":0,"power":4000,"legacy":1,"anyNumCopies":false,"orderTable":236,"orderDeck":287},</text:p>
          </table:table-cell>
          <table:table-cell table:number-columns-repeated="16356"/>
        </table:table-row>
        <table:table-row table:style-name="ro2">
          <table:table-cell table:style-name="ce11" office:value-type="float" office:value="237" calcext:value-type="float">
            <text:p>237</text:p>
          </table:table-cell>
          <table:table-cell table:style-name="ce11" office:value-type="float" office:value="254" calcext:value-type="float">
            <text:p>254</text:p>
          </table:table-cell>
          <table:table-cell table:style-name="ce21" office:value-type="string" calcext:value-type="string">
            <text:p>3-9</text:p>
          </table:table-cell>
          <table:table-cell table:style-name="ce21" office:value-type="float" office:value="9" calcext:value-type="float">
            <text:p>9</text:p>
          </table:table-cell>
          <table:table-cell table:style-name="ce11" office:value-type="string" calcext:value-type="string">
            <text:p>土方歳三</text:p>
          </table:table-cell>
          <table:table-cell table:style-name="ce11" table:formula="of:=[.E238]" office:value-type="string" office:string-value="土方歳三" calcext:value-type="string">
            <text:p>土方歳三</text:p>
          </table:table-cell>
          <table:table-cell table:style-name="ce11" office:value-type="string" calcext:value-type="string">
            <text:p>ひじかたとしぞう</text:p>
          </table:table-cell>
          <table:table-cell table:style-name="ce11" office:value-type="string" calcext:value-type="string">
            <text:p>第３弾ブースターパック</text:p>
          </table:table-cell>
          <table:table-cell table:style-name="ce11" table:formula="of:=VLOOKUP([.H238];[$収録番号.$A$1:$収録番号.$B$10];2;0)" office:value-type="float" office:value="35" calcext:value-type="float">
            <text:p>35</text:p>
          </table:table-cell>
          <table:table-cell table:style-name="ce11" office:value-type="string" calcext:value-type="string">
            <text:p>SR</text:p>
          </table:table-cell>
          <table:table-cell table:style-name="ce11" table:formula="of:=VLOOKUP([.J23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38];[$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8];[$能力語番号.$A$1:$能力語番号.$B$11];2;0);0)" office:value-type="float" office:value="0" calcext:value-type="float">
            <text:p>0</text:p>
          </table:table-cell>
          <table:table-cell office:value-type="string" calcext:value-type="string">
            <text:p>志願</text:p>
          </table:table-cell>
          <table:table-cell table:style-name="ce11" table:formula="of:=IFERROR(VLOOKUP([.$T238];[$特性番号.$A$1:$特性番号.$B$8];2;0);0)" office:value-type="float" office:value="32" calcext:value-type="float">
            <text:p>32</text:p>
          </table:table-cell>
          <table:table-cell table:style-name="ce11"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23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09.png</text:p>
          </table:table-cell>
          <table:table-cell table:style-name="ce11" table:formula="of:=CONCATENATE([$JSON.$A$1];[.$C238];[$JSON.$B$1];[.$E238];[$JSON.$C$1];[.F238];[$JSON.$D$1];[.$G238];[$JSON.$E$1];IF(ISNA([.$T238]);&quot;null&quot;;&quot;&quot;&quot;&quot;&amp;[.$T238]&amp;&quot;&quot;&quot;&quot;);[$JSON.$F$1];[.$V238];[$JSON.$G$1];IF(ISNA([.$X238]);&quot;null&quot;;&quot;&quot;&quot;&quot;&amp;[.$X238]&amp;&quot;&quot;&quot;&quot;);[$JSON.$H$1];[.$AA238];[$JSON.$I$1];[.$I238];[$JSON.$J$1];[.K238];[$JSON.$K$1];[.$M238];[$JSON.$L$1];[.$P238];[$JSON.$M$1];[.$O238];[$JSON.$N$1];[.$S238];[$JSON.$O$1];[.$U238];[$JSON.$P$1];IF(ISNA([.$W238]);&quot;null&quot;;[.$W238]);[$JSON.$Q$1];[.$Y238];[$JSON.$R$1];IF([.$Z238];&quot;true&quot;;&quot;false&quot;);[$JSON.$S$1];[.$A238];[$JSON.$T$1];[.$B238];[$JSON.$U$1])" office:value-type="string" office:string-value="{&quot;id&quot;:&quot;3-9&quot;,&quot;name&quot;:&quot;土方歳三&quot;,&quot;displayName&quot;:&quot;土方歳三&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rarity&quot;:4,&quot;type&quot;:1,&quot;level&quot;:6,&quot;color&quot;:16,&quot;term&quot;:0,&quot;trait&quot;:32,&quot;power&quot;:5000,&quot;legacy&quot;:7,&quot;anyNumCopies&quot;:false,&quot;orderTable&quot;:237,&quot;orderDeck&quot;:254}," calcext:value-type="string">
            <text:p>{"id":"3-9","name":"土方歳三","displayName":"土方歳三","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rarity":4,"type":1,"level":6,"color":16,"term":0,"trait":32,"power":5000,"legacy":7,"anyNumCopies":false,"orderTable":237,"orderDeck":254},</text:p>
          </table:table-cell>
          <table:table-cell table:number-columns-repeated="16356"/>
        </table:table-row>
        <table:table-row table:style-name="ro2">
          <table:table-cell table:style-name="ce11" office:value-type="float" office:value="238" calcext:value-type="float">
            <text:p>238</text:p>
          </table:table-cell>
          <table:table-cell table:style-name="ce11" office:value-type="float" office:value="77" calcext:value-type="float">
            <text:p>77</text:p>
          </table:table-cell>
          <table:table-cell table:style-name="ce21" office:value-type="string" calcext:value-type="string">
            <text:p>3-10</text:p>
          </table:table-cell>
          <table:table-cell table:style-name="ce21" office:value-type="float" office:value="10" calcext:value-type="float">
            <text:p>10</text:p>
          </table:table-cell>
          <table:table-cell table:style-name="ce11" office:value-type="string" calcext:value-type="string">
            <text:p>武則天</text:p>
          </table:table-cell>
          <table:table-cell table:style-name="ce11" table:formula="of:=[.E239]" office:value-type="string" office:string-value="武則天" calcext:value-type="string">
            <text:p>武則天</text:p>
          </table:table-cell>
          <table:table-cell table:style-name="ce11" office:value-type="string" calcext:value-type="string">
            <text:p>ぶそくてん</text:p>
          </table:table-cell>
          <table:table-cell table:style-name="ce11" office:value-type="string" calcext:value-type="string">
            <text:p>第３弾ブースターパック</text:p>
          </table:table-cell>
          <table:table-cell table:style-name="ce11" table:formula="of:=VLOOKUP([.H239];[$収録番号.$A$1:$収録番号.$B$10];2;0)" office:value-type="float" office:value="35" calcext:value-type="float">
            <text:p>35</text:p>
          </table:table-cell>
          <table:table-cell table:style-name="ce11" office:value-type="string" calcext:value-type="string">
            <text:p>SR</text:p>
          </table:table-cell>
          <table:table-cell table:style-name="ce11" table:formula="of:=VLOOKUP([.J23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23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39];[$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3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39];[$特性番号.$A$1:$特性番号.$B$8];2;0);0)" office:value-type="float" office:value="0" calcext:value-type="float">
            <text:p>0</text:p>
          </table:table-cell>
          <table:table-cell table:style-name="ce11"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23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0.png</text:p>
          </table:table-cell>
          <table:table-cell table:style-name="ce11" table:formula="of:=CONCATENATE([$JSON.$A$1];[.$C239];[$JSON.$B$1];[.$E239];[$JSON.$C$1];[.F239];[$JSON.$D$1];[.$G239];[$JSON.$E$1];IF(ISNA([.$T239]);&quot;null&quot;;&quot;&quot;&quot;&quot;&amp;[.$T239]&amp;&quot;&quot;&quot;&quot;);[$JSON.$F$1];[.$V239];[$JSON.$G$1];IF(ISNA([.$X239]);&quot;null&quot;;&quot;&quot;&quot;&quot;&amp;[.$X239]&amp;&quot;&quot;&quot;&quot;);[$JSON.$H$1];[.$AA239];[$JSON.$I$1];[.$I239];[$JSON.$J$1];[.K239];[$JSON.$K$1];[.$M239];[$JSON.$L$1];[.$P239];[$JSON.$M$1];[.$O239];[$JSON.$N$1];[.$S239];[$JSON.$O$1];[.$U239];[$JSON.$P$1];IF(ISNA([.$W239]);&quot;null&quot;;[.$W239]);[$JSON.$Q$1];[.$Y239];[$JSON.$R$1];IF([.$Z239];&quot;true&quot;;&quot;false&quot;);[$JSON.$S$1];[.$A239];[$JSON.$T$1];[.$B239];[$JSON.$U$1])" office:value-type="string" office:string-value="{&quot;id&quot;:&quot;3-10&quot;,&quot;name&quot;:&quot;武則天&quot;,&quot;displayName&quot;:&quot;武則天&quot;,&quot;kana&quot;:&quot;ぶそくてん&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rarity&quot;:4,&quot;type&quot;:1,&quot;level&quot;:2,&quot;color&quot;:16,&quot;term&quot;:0,&quot;trait&quot;:0,&quot;power&quot;:1500,&quot;legacy&quot;:4,&quot;anyNumCopies&quot;:false,&quot;orderTable&quot;:238,&quot;orderDeck&quot;:77}," calcext:value-type="string">
            <text:p>{"id":"3-10","name":"武則天","displayName":"武則天","kana":"ぶそくてん","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rarity":4,"type":1,"level":2,"color":16,"term":0,"trait":0,"power":1500,"legacy":4,"anyNumCopies":false,"orderTable":238,"orderDeck":77},</text:p>
          </table:table-cell>
          <table:table-cell table:number-columns-repeated="16356"/>
        </table:table-row>
        <table:table-row table:style-name="ro2">
          <table:table-cell table:style-name="ce11" office:value-type="float" office:value="239" calcext:value-type="float">
            <text:p>239</text:p>
          </table:table-cell>
          <table:table-cell table:style-name="ce11" office:value-type="float" office:value="141" calcext:value-type="float">
            <text:p>141</text:p>
          </table:table-cell>
          <table:table-cell table:style-name="ce21" office:value-type="string" calcext:value-type="string">
            <text:p>3-11</text:p>
          </table:table-cell>
          <table:table-cell table:style-name="ce21" office:value-type="float" office:value="11" calcext:value-type="float">
            <text:p>11</text:p>
          </table:table-cell>
          <table:table-cell table:style-name="ce11" office:value-type="string" calcext:value-type="string">
            <text:p>ウィリアム・セシル</text:p>
          </table:table-cell>
          <table:table-cell table:style-name="ce11" table:formula="of:=[.E240]" office:value-type="string" office:string-value="ウィリアム・セシル" calcext:value-type="string">
            <text:p>ウィリアム・セシル</text:p>
          </table:table-cell>
          <table:table-cell table:style-name="ce11" office:value-type="string" calcext:value-type="string">
            <text:p>うぃりあむせしる</text:p>
          </table:table-cell>
          <table:table-cell table:style-name="ce11" office:value-type="string" calcext:value-type="string">
            <text:p>第３弾ブースターパック</text:p>
          </table:table-cell>
          <table:table-cell table:style-name="ce11" table:formula="of:=VLOOKUP([.H240];[$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4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0];[$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0];[$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40];[$特性番号.$A$1:$特性番号.$B$8];2;0);0)" office:value-type="float" office:value="0" calcext:value-type="float">
            <text:p>0</text:p>
          </table:table-cell>
          <table:table-cell table:style-name="ce11" office:value-type="string" calcext:value-type="string">
            <text:p>スタンド¶戦場に置かれたとき、1ドロー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4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1.png</text:p>
          </table:table-cell>
          <table:table-cell table:style-name="ce11" table:formula="of:=CONCATENATE([$JSON.$A$1];[.$C240];[$JSON.$B$1];[.$E240];[$JSON.$C$1];[.F240];[$JSON.$D$1];[.$G240];[$JSON.$E$1];IF(ISNA([.$T240]);&quot;null&quot;;&quot;&quot;&quot;&quot;&amp;[.$T240]&amp;&quot;&quot;&quot;&quot;);[$JSON.$F$1];[.$V240];[$JSON.$G$1];IF(ISNA([.$X240]);&quot;null&quot;;&quot;&quot;&quot;&quot;&amp;[.$X240]&amp;&quot;&quot;&quot;&quot;);[$JSON.$H$1];[.$AA240];[$JSON.$I$1];[.$I240];[$JSON.$J$1];[.K240];[$JSON.$K$1];[.$M240];[$JSON.$L$1];[.$P240];[$JSON.$M$1];[.$O240];[$JSON.$N$1];[.$S240];[$JSON.$O$1];[.$U240];[$JSON.$P$1];IF(ISNA([.$W240]);&quot;null&quot;;[.$W240]);[$JSON.$Q$1];[.$Y240];[$JSON.$R$1];IF([.$Z240];&quot;true&quot;;&quot;false&quot;);[$JSON.$S$1];[.$A240];[$JSON.$T$1];[.$B240];[$JSON.$U$1])" office:value-type="string" office:string-value="{&quot;id&quot;:&quot;3-11&quot;,&quot;name&quot;:&quot;ウィリアム・セシル&quot;,&quot;displayName&quot;:&quot;ウィリアム・セシル&quot;,&quot;kana&quot;:&quot;うぃりあむせしる&quot;,&quot;traitText&quot;:null,&quot;ruleText&quot;:&quot;スタンド¶戦場に置かれたとき、1ドローする。&quot;,&quot;legacyText&quot;:&quot;1ドローする&quot;,&quot;imageUrl&quot;:&quot;https://one-draw.jp/ijinden/cardlist/003/card/03_011.png&quot;,&quot;expansion&quot;:35,&quot;rarity&quot;:1,&quot;type&quot;:1,&quot;level&quot;:4,&quot;color&quot;:1,&quot;term&quot;:0,&quot;trait&quot;:0,&quot;power&quot;:1000,&quot;legacy&quot;:4,&quot;anyNumCopies&quot;:false,&quot;orderTable&quot;:239,&quot;orderDeck&quot;:141}," calcext:value-type="string">
            <text:p>{"id":"3-11","name":"ウィリアム・セシル","displayName":"ウィリアム・セシル","kana":"うぃりあむせしる","traitText":null,"ruleText":"スタンド¶戦場に置かれたとき、1ドローする。","legacyText":"1ドローする","imageUrl":"https://one-draw.jp/ijinden/cardlist/003/card/03_011.png","expansion":35,"rarity":1,"type":1,"level":4,"color":1,"term":0,"trait":0,"power":1000,"legacy":4,"anyNumCopies":false,"orderTable":239,"orderDeck":141},</text:p>
          </table:table-cell>
          <table:table-cell table:number-columns-repeated="16356"/>
        </table:table-row>
        <table:table-row table:style-name="ro2">
          <table:table-cell table:style-name="ce11" office:value-type="float" office:value="240" calcext:value-type="float">
            <text:p>240</text:p>
          </table:table-cell>
          <table:table-cell table:style-name="ce11" office:value-type="float" office:value="89" calcext:value-type="float">
            <text:p>89</text:p>
          </table:table-cell>
          <table:table-cell table:style-name="ce21" office:value-type="string" calcext:value-type="string">
            <text:p>3-12</text:p>
          </table:table-cell>
          <table:table-cell table:style-name="ce21" office:value-type="float" office:value="12" calcext:value-type="float">
            <text:p>12</text:p>
          </table:table-cell>
          <table:table-cell table:style-name="ce11" office:value-type="string" calcext:value-type="string">
            <text:p>イーライ・ホイットニー</text:p>
          </table:table-cell>
          <table:table-cell table:style-name="ce11" table:formula="of:=[.E241]" office:value-type="string" office:string-value="イーライ・ホイットニー" calcext:value-type="string">
            <text:p>イーライ・ホイットニー</text:p>
          </table:table-cell>
          <table:table-cell table:style-name="ce11" office:value-type="string" calcext:value-type="string">
            <text:p>いーらいほいっとにー</text:p>
          </table:table-cell>
          <table:table-cell table:style-name="ce11" office:value-type="string" calcext:value-type="string">
            <text:p>第３弾ブースターパック</text:p>
          </table:table-cell>
          <table:table-cell table:style-name="ce11" table:formula="of:=VLOOKUP([.H241];[$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4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1];[$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41];[$特性番号.$A$1:$特性番号.$B$8];2;0);0)" office:value-type="float" office:value="0" calcext:value-type="float">
            <text:p>0</text:p>
          </table:table-cell>
          <table:table-cell table:style-name="ce11" office:value-type="string" calcext:value-type="string">
            <text:p>戦場に置かれたとき、自分の魔力ゾーンの裏のカード1つを手札に戻して発動できる。相手の戦場のパワー3000以下のイジン1体を破壊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4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2.png</text:p>
          </table:table-cell>
          <table:table-cell table:style-name="ce11" table:formula="of:=CONCATENATE([$JSON.$A$1];[.$C241];[$JSON.$B$1];[.$E241];[$JSON.$C$1];[.F241];[$JSON.$D$1];[.$G241];[$JSON.$E$1];IF(ISNA([.$T241]);&quot;null&quot;;&quot;&quot;&quot;&quot;&amp;[.$T241]&amp;&quot;&quot;&quot;&quot;);[$JSON.$F$1];[.$V241];[$JSON.$G$1];IF(ISNA([.$X241]);&quot;null&quot;;&quot;&quot;&quot;&quot;&amp;[.$X241]&amp;&quot;&quot;&quot;&quot;);[$JSON.$H$1];[.$AA241];[$JSON.$I$1];[.$I241];[$JSON.$J$1];[.K241];[$JSON.$K$1];[.$M241];[$JSON.$L$1];[.$P241];[$JSON.$M$1];[.$O241];[$JSON.$N$1];[.$S241];[$JSON.$O$1];[.$U241];[$JSON.$P$1];IF(ISNA([.$W241]);&quot;null&quot;;[.$W241]);[$JSON.$Q$1];[.$Y241];[$JSON.$R$1];IF([.$Z241];&quot;true&quot;;&quot;false&quot;);[$JSON.$S$1];[.$A241];[$JSON.$T$1];[.$B241];[$JSON.$U$1])" office:value-type="string" office:string-value="{&quot;id&quot;:&quot;3-12&quot;,&quot;name&quot;:&quot;イーライ・ホイットニー&quot;,&quot;displayName&quot;:&quot;イーライ・ホイットニー&quot;,&quot;kana&quot;:&quot;いーらいほいっとに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rarity&quot;:1,&quot;type&quot;:1,&quot;level&quot;:3,&quot;color&quot;:1,&quot;term&quot;:0,&quot;trait&quot;:0,&quot;power&quot;:2000,&quot;legacy&quot;:4,&quot;anyNumCopies&quot;:false,&quot;orderTable&quot;:240,&quot;orderDeck&quot;:89}," calcext:value-type="string">
            <text:p>{"id":"3-12","name":"イーライ・ホイットニー","displayName":"イーライ・ホイットニー","kana":"いーらいほいっとに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rarity":1,"type":1,"level":3,"color":1,"term":0,"trait":0,"power":2000,"legacy":4,"anyNumCopies":false,"orderTable":240,"orderDeck":89},</text:p>
          </table:table-cell>
          <table:table-cell table:number-columns-repeated="16356"/>
        </table:table-row>
        <table:table-row table:style-name="ro2">
          <table:table-cell table:style-name="ce11" office:value-type="float" office:value="241" calcext:value-type="float">
            <text:p>241</text:p>
          </table:table-cell>
          <table:table-cell table:style-name="ce11" office:value-type="float" office:value="36" calcext:value-type="float">
            <text:p>36</text:p>
          </table:table-cell>
          <table:table-cell table:style-name="ce21" office:value-type="string" calcext:value-type="string">
            <text:p>3-13</text:p>
          </table:table-cell>
          <table:table-cell table:style-name="ce21" office:value-type="float" office:value="13" calcext:value-type="float">
            <text:p>13</text:p>
          </table:table-cell>
          <table:table-cell table:style-name="ce11" office:value-type="string" calcext:value-type="string">
            <text:p>平賀源内</text:p>
          </table:table-cell>
          <table:table-cell table:style-name="ce11" table:formula="of:=[.E242]" office:value-type="string" office:string-value="平賀源内" calcext:value-type="string">
            <text:p>平賀源内</text:p>
          </table:table-cell>
          <table:table-cell table:style-name="ce11" office:value-type="string" calcext:value-type="string">
            <text:p>ひらがげんない</text:p>
          </table:table-cell>
          <table:table-cell table:style-name="ce11" office:value-type="string" calcext:value-type="string">
            <text:p>第３弾ブースターパック</text:p>
          </table:table-cell>
          <table:table-cell table:style-name="ce11" table:formula="of:=VLOOKUP([.H242];[$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2];[$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42];[$特性番号.$A$1:$特性番号.$B$8];2;0);0)" office:value-type="float" office:value="0" calcext:value-type="float">
            <text:p>0</text:p>
          </table:table-cell>
          <table:table-cell table:style-name="ce11"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4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3.png</text:p>
          </table:table-cell>
          <table:table-cell table:style-name="ce11" table:formula="of:=CONCATENATE([$JSON.$A$1];[.$C242];[$JSON.$B$1];[.$E242];[$JSON.$C$1];[.F242];[$JSON.$D$1];[.$G242];[$JSON.$E$1];IF(ISNA([.$T242]);&quot;null&quot;;&quot;&quot;&quot;&quot;&amp;[.$T242]&amp;&quot;&quot;&quot;&quot;);[$JSON.$F$1];[.$V242];[$JSON.$G$1];IF(ISNA([.$X242]);&quot;null&quot;;&quot;&quot;&quot;&quot;&amp;[.$X242]&amp;&quot;&quot;&quot;&quot;);[$JSON.$H$1];[.$AA242];[$JSON.$I$1];[.$I242];[$JSON.$J$1];[.K242];[$JSON.$K$1];[.$M242];[$JSON.$L$1];[.$P242];[$JSON.$M$1];[.$O242];[$JSON.$N$1];[.$S242];[$JSON.$O$1];[.$U242];[$JSON.$P$1];IF(ISNA([.$W242]);&quot;null&quot;;[.$W242]);[$JSON.$Q$1];[.$Y242];[$JSON.$R$1];IF([.$Z242];&quot;true&quot;;&quot;false&quot;);[$JSON.$S$1];[.$A242];[$JSON.$T$1];[.$B242];[$JSON.$U$1])" office:value-type="string" office:string-value="{&quot;id&quot;:&quot;3-13&quot;,&quot;name&quot;:&quot;平賀源内&quot;,&quot;displayName&quot;:&quot;平賀源内&quot;,&quot;kana&quot;:&quot;ひらがげんない&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rarity&quot;:1,&quot;type&quot;:1,&quot;level&quot;:2,&quot;color&quot;:1,&quot;term&quot;:0,&quot;trait&quot;:0,&quot;power&quot;:1000,&quot;legacy&quot;:4,&quot;anyNumCopies&quot;:false,&quot;orderTable&quot;:241,&quot;orderDeck&quot;:36}," calcext:value-type="string">
            <text:p>{"id":"3-13","name":"平賀源内","displayName":"平賀源内","kana":"ひらがげんない","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rarity":1,"type":1,"level":2,"color":1,"term":0,"trait":0,"power":1000,"legacy":4,"anyNumCopies":false,"orderTable":241,"orderDeck":36},</text:p>
          </table:table-cell>
          <table:table-cell table:number-columns-repeated="16356"/>
        </table:table-row>
        <table:table-row table:style-name="ro2">
          <table:table-cell table:style-name="ce11" office:value-type="float" office:value="242" calcext:value-type="float">
            <text:p>242</text:p>
          </table:table-cell>
          <table:table-cell table:style-name="ce11" office:value-type="float" office:value="90" calcext:value-type="float">
            <text:p>90</text:p>
          </table:table-cell>
          <table:table-cell table:style-name="ce21" office:value-type="string" calcext:value-type="string">
            <text:p>3-14</text:p>
          </table:table-cell>
          <table:table-cell table:style-name="ce21" office:value-type="float" office:value="14" calcext:value-type="float">
            <text:p>14</text:p>
          </table:table-cell>
          <table:table-cell table:style-name="ce11" office:value-type="string" calcext:value-type="string">
            <text:p>ジョージ・スチーブンソン</text:p>
          </table:table-cell>
          <table:table-cell table:style-name="ce11" table:formula="of:=[.E243]" office:value-type="string" office:string-value="ジョージ・スチーブンソン" calcext:value-type="string">
            <text:p>ジョージ・スチーブンソン</text:p>
          </table:table-cell>
          <table:table-cell table:style-name="ce11" office:value-type="string" calcext:value-type="string">
            <text:p>じょーじすちーぶんそん</text:p>
          </table:table-cell>
          <table:table-cell table:style-name="ce11" office:value-type="string" calcext:value-type="string">
            <text:p>第３弾ブースターパック</text:p>
          </table:table-cell>
          <table:table-cell table:style-name="ce11" table:formula="of:=VLOOKUP([.H243];[$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4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3];[$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3];[$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43];[$特性番号.$A$1:$特性番号.$B$8];2;0);0)" office:value-type="float" office:value="0" calcext:value-type="float">
            <text:p>0</text:p>
          </table:table-cell>
          <table:table-cell table:style-name="ce11" office:value-type="string" calcext:value-type="string">
            <text:p>戦場に置かれたとき、自分の魔力ゾーンの裏のカード1つを手札に戻して発動できる。マリョク配置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24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4.png</text:p>
          </table:table-cell>
          <table:table-cell table:style-name="ce11" table:formula="of:=CONCATENATE([$JSON.$A$1];[.$C243];[$JSON.$B$1];[.$E243];[$JSON.$C$1];[.F243];[$JSON.$D$1];[.$G243];[$JSON.$E$1];IF(ISNA([.$T243]);&quot;null&quot;;&quot;&quot;&quot;&quot;&amp;[.$T243]&amp;&quot;&quot;&quot;&quot;);[$JSON.$F$1];[.$V243];[$JSON.$G$1];IF(ISNA([.$X243]);&quot;null&quot;;&quot;&quot;&quot;&quot;&amp;[.$X243]&amp;&quot;&quot;&quot;&quot;);[$JSON.$H$1];[.$AA243];[$JSON.$I$1];[.$I243];[$JSON.$J$1];[.K243];[$JSON.$K$1];[.$M243];[$JSON.$L$1];[.$P243];[$JSON.$M$1];[.$O243];[$JSON.$N$1];[.$S243];[$JSON.$O$1];[.$U243];[$JSON.$P$1];IF(ISNA([.$W243]);&quot;null&quot;;[.$W243]);[$JSON.$Q$1];[.$Y243];[$JSON.$R$1];IF([.$Z243];&quot;true&quot;;&quot;false&quot;);[$JSON.$S$1];[.$A243];[$JSON.$T$1];[.$B243];[$JSON.$U$1])" office:value-type="string" office:string-value="{&quot;id&quot;:&quot;3-14&quot;,&quot;name&quot;:&quot;ジョージ・スチーブンソン&quot;,&quot;displayName&quot;:&quot;ジョージ・スチーブンソン&quot;,&quot;kana&quot;:&quot;じょーじすちーぶんそん&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rarity&quot;:1,&quot;type&quot;:1,&quot;level&quot;:3,&quot;color&quot;:1,&quot;term&quot;:0,&quot;trait&quot;:0,&quot;power&quot;:3000,&quot;legacy&quot;:4,&quot;anyNumCopies&quot;:false,&quot;orderTable&quot;:242,&quot;orderDeck&quot;:90}," calcext:value-type="string">
            <text:p>{"id":"3-14","name":"ジョージ・スチーブンソン","displayName":"ジョージ・スチーブンソン","kana":"じょーじすちーぶんそん","traitText":null,"ruleText":"戦場に置かれたとき、自分の魔力ゾーンの裏のカード1つを手札に戻して発動できる。マリョク配置権+1する。","legacyText":"1ドローする","imageUrl":"https://one-draw.jp/ijinden/cardlist/003/card/03_014.png","expansion":35,"rarity":1,"type":1,"level":3,"color":1,"term":0,"trait":0,"power":3000,"legacy":4,"anyNumCopies":false,"orderTable":242,"orderDeck":90},</text:p>
          </table:table-cell>
          <table:table-cell table:number-columns-repeated="16356"/>
        </table:table-row>
        <table:table-row table:style-name="ro2">
          <table:table-cell table:style-name="ce11" office:value-type="float" office:value="243" calcext:value-type="float">
            <text:p>243</text:p>
          </table:table-cell>
          <table:table-cell table:style-name="ce11" office:value-type="float" office:value="189" calcext:value-type="float">
            <text:p>189</text:p>
          </table:table-cell>
          <table:table-cell table:style-name="ce21" office:value-type="string" calcext:value-type="string">
            <text:p>3-15</text:p>
          </table:table-cell>
          <table:table-cell table:style-name="ce21" office:value-type="float" office:value="15" calcext:value-type="float">
            <text:p>15</text:p>
          </table:table-cell>
          <table:table-cell table:style-name="ce11" office:value-type="string" calcext:value-type="string">
            <text:p>淀殿</text:p>
          </table:table-cell>
          <table:table-cell table:style-name="ce11" table:formula="of:=[.E244]" office:value-type="string" office:string-value="淀殿" calcext:value-type="string">
            <text:p>淀殿</text:p>
          </table:table-cell>
          <table:table-cell table:style-name="ce11" office:value-type="string" calcext:value-type="string">
            <text:p>よどどの</text:p>
          </table:table-cell>
          <table:table-cell table:style-name="ce11" office:value-type="string" calcext:value-type="string">
            <text:p>第３弾ブースターパック</text:p>
          </table:table-cell>
          <table:table-cell table:style-name="ce11" table:formula="of:=VLOOKUP([.H244];[$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4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4];[$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4];[$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44];[$特性番号.$A$1:$特性番号.$B$8];2;0);0)" office:value-type="float" office:value="0" calcext:value-type="float">
            <text:p>0</text:p>
          </table:table-cell>
          <table:table-cell table:style-name="ce11"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table:style-name="ce11" office:value-type="float" office:value="4000" calcext:value-type="float">
            <text:p>4000</text:p>
          </table:table-cell>
          <table:table-cell table:style-name="ce25" office:value-type="string" calcext:value-type="string">
            <text:p>1ドローする</text:p>
          </table:table-cell>
          <table:table-cell table:style-name="ce11" table:formula="of:=IFERROR(VLOOKUP([.$X24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5.png</text:p>
          </table:table-cell>
          <table:table-cell table:style-name="ce11" table:formula="of:=CONCATENATE([$JSON.$A$1];[.$C244];[$JSON.$B$1];[.$E244];[$JSON.$C$1];[.F244];[$JSON.$D$1];[.$G244];[$JSON.$E$1];IF(ISNA([.$T244]);&quot;null&quot;;&quot;&quot;&quot;&quot;&amp;[.$T244]&amp;&quot;&quot;&quot;&quot;);[$JSON.$F$1];[.$V244];[$JSON.$G$1];IF(ISNA([.$X244]);&quot;null&quot;;&quot;&quot;&quot;&quot;&amp;[.$X244]&amp;&quot;&quot;&quot;&quot;);[$JSON.$H$1];[.$AA244];[$JSON.$I$1];[.$I244];[$JSON.$J$1];[.K244];[$JSON.$K$1];[.$M244];[$JSON.$L$1];[.$P244];[$JSON.$M$1];[.$O244];[$JSON.$N$1];[.$S244];[$JSON.$O$1];[.$U244];[$JSON.$P$1];IF(ISNA([.$W244]);&quot;null&quot;;[.$W244]);[$JSON.$Q$1];[.$Y244];[$JSON.$R$1];IF([.$Z244];&quot;true&quot;;&quot;false&quot;);[$JSON.$S$1];[.$A244];[$JSON.$T$1];[.$B244];[$JSON.$U$1])" office:value-type="string" office:string-value="{&quot;id&quot;:&quot;3-15&quot;,&quot;name&quot;:&quot;淀殿&quot;,&quot;displayName&quot;:&quot;淀殿&quot;,&quot;kana&quot;:&quot;よどどの&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rarity&quot;:2,&quot;type&quot;:1,&quot;level&quot;:5,&quot;color&quot;:1,&quot;term&quot;:0,&quot;trait&quot;:0,&quot;power&quot;:4000,&quot;legacy&quot;:4,&quot;anyNumCopies&quot;:false,&quot;orderTable&quot;:243,&quot;orderDeck&quot;:189}," calcext:value-type="string">
            <text:p>{"id":"3-15","name":"淀殿","displayName":"淀殿","kana":"よどどの","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rarity":2,"type":1,"level":5,"color":1,"term":0,"trait":0,"power":4000,"legacy":4,"anyNumCopies":false,"orderTable":243,"orderDeck":189},</text:p>
          </table:table-cell>
          <table:table-cell table:number-columns-repeated="16356"/>
        </table:table-row>
        <table:table-row table:style-name="ro2">
          <table:table-cell table:style-name="ce11" office:value-type="float" office:value="244" calcext:value-type="float">
            <text:p>244</text:p>
          </table:table-cell>
          <table:table-cell table:style-name="ce11" office:value-type="float" office:value="5" calcext:value-type="float">
            <text:p>5</text:p>
          </table:table-cell>
          <table:table-cell table:style-name="ce21" office:value-type="string" calcext:value-type="string">
            <text:p>3-16</text:p>
          </table:table-cell>
          <table:table-cell table:style-name="ce21" office:value-type="float" office:value="16" calcext:value-type="float">
            <text:p>16</text:p>
          </table:table-cell>
          <table:table-cell table:style-name="ce11" office:value-type="string" calcext:value-type="string">
            <text:p>ジョージ・ワシントン</text:p>
          </table:table-cell>
          <table:table-cell table:style-name="ce11" table:formula="of:=[.E245]" office:value-type="string" office:string-value="ジョージ・ワシントン" calcext:value-type="string">
            <text:p>ジョージ・ワシントン</text:p>
          </table:table-cell>
          <table:table-cell table:style-name="ce11" office:value-type="string" calcext:value-type="string">
            <text:p>じょーじわしんとん</text:p>
          </table:table-cell>
          <table:table-cell table:style-name="ce11" office:value-type="string" calcext:value-type="string">
            <text:p>第３弾ブースターパック</text:p>
          </table:table-cell>
          <table:table-cell table:style-name="ce11" table:formula="of:=VLOOKUP([.H245];[$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4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5];[$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5];[$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45];[$特性番号.$A$1:$特性番号.$B$8];2;0);0)" office:value-type="float" office:value="0" calcext:value-type="float">
            <text:p>0</text:p>
          </table:table-cell>
          <table:table-cell table:style-name="ce11" office:value-type="string" calcext:value-type="string">
            <text:p>これが戦場にいる間、自分の戦場の『アタック+』能力を持つイジンは「即応」を得る。</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4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6.png</text:p>
          </table:table-cell>
          <table:table-cell table:style-name="ce11" table:formula="of:=CONCATENATE([$JSON.$A$1];[.$C245];[$JSON.$B$1];[.$E245];[$JSON.$C$1];[.F245];[$JSON.$D$1];[.$G245];[$JSON.$E$1];IF(ISNA([.$T245]);&quot;null&quot;;&quot;&quot;&quot;&quot;&amp;[.$T245]&amp;&quot;&quot;&quot;&quot;);[$JSON.$F$1];[.$V245];[$JSON.$G$1];IF(ISNA([.$X245]);&quot;null&quot;;&quot;&quot;&quot;&quot;&amp;[.$X245]&amp;&quot;&quot;&quot;&quot;);[$JSON.$H$1];[.$AA245];[$JSON.$I$1];[.$I245];[$JSON.$J$1];[.K245];[$JSON.$K$1];[.$M245];[$JSON.$L$1];[.$P245];[$JSON.$M$1];[.$O245];[$JSON.$N$1];[.$S245];[$JSON.$O$1];[.$U245];[$JSON.$P$1];IF(ISNA([.$W245]);&quot;null&quot;;[.$W245]);[$JSON.$Q$1];[.$Y245];[$JSON.$R$1];IF([.$Z245];&quot;true&quot;;&quot;false&quot;);[$JSON.$S$1];[.$A245];[$JSON.$T$1];[.$B245];[$JSON.$U$1])" office:value-type="string" office:string-value="{&quot;id&quot;:&quot;3-16&quot;,&quot;name&quot;:&quot;ジョージ・ワシントン&quot;,&quot;displayName&quot;:&quot;ジョージ・ワシントン&quot;,&quot;kana&quot;:&quot;じょーじわしんとん&quot;,&quot;traitText&quot;:null,&quot;ruleText&quot;:&quot;これが戦場にいる間、自分の戦場の『アタック+』能力を持つイジンは「即応」を得る。&quot;,&quot;legacyText&quot;:null,&quot;imageUrl&quot;:&quot;https://one-draw.jp/ijinden/cardlist/003/card/03_016.png&quot;,&quot;expansion&quot;:35,&quot;rarity&quot;:2,&quot;type&quot;:1,&quot;level&quot;:1,&quot;color&quot;:1,&quot;term&quot;:0,&quot;trait&quot;:0,&quot;power&quot;:500,&quot;legacy&quot;:0,&quot;anyNumCopies&quot;:false,&quot;orderTable&quot;:244,&quot;orderDeck&quot;:5}," calcext:value-type="string">
            <text:p>{"id":"3-16","name":"ジョージ・ワシントン","displayName":"ジョージ・ワシントン","kana":"じょーじわしんとん","traitText":null,"ruleText":"これが戦場にいる間、自分の戦場の『アタック+』能力を持つイジンは「即応」を得る。","legacyText":null,"imageUrl":"https://one-draw.jp/ijinden/cardlist/003/card/03_016.png","expansion":35,"rarity":2,"type":1,"level":1,"color":1,"term":0,"trait":0,"power":500,"legacy":0,"anyNumCopies":false,"orderTable":244,"orderDeck":5},</text:p>
          </table:table-cell>
          <table:table-cell table:number-columns-repeated="16356"/>
        </table:table-row>
        <table:table-row table:style-name="ro2">
          <table:table-cell table:style-name="ce11" office:value-type="float" office:value="245" calcext:value-type="float">
            <text:p>245</text:p>
          </table:table-cell>
          <table:table-cell table:style-name="ce11" office:value-type="float" office:value="278" calcext:value-type="float">
            <text:p>278</text:p>
          </table:table-cell>
          <table:table-cell table:style-name="ce21" office:value-type="string" calcext:value-type="string">
            <text:p>3-17</text:p>
          </table:table-cell>
          <table:table-cell table:style-name="ce21" office:value-type="float" office:value="17" calcext:value-type="float">
            <text:p>17</text:p>
          </table:table-cell>
          <table:table-cell table:style-name="ce11" office:value-type="string" calcext:value-type="string">
            <text:p>大塩平八郎</text:p>
          </table:table-cell>
          <table:table-cell table:style-name="ce11" table:formula="of:=[.E246]" office:value-type="string" office:string-value="大塩平八郎" calcext:value-type="string">
            <text:p>大塩平八郎</text:p>
          </table:table-cell>
          <table:table-cell table:style-name="ce11" office:value-type="string" calcext:value-type="string">
            <text:p>おおしおへいはちろう</text:p>
          </table:table-cell>
          <table:table-cell table:style-name="ce11" office:value-type="string" calcext:value-type="string">
            <text:p>第３弾ブースターパック</text:p>
          </table:table-cell>
          <table:table-cell table:style-name="ce11" table:formula="of:=VLOOKUP([.H246];[$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6];[$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6];[$色番号.$A$1:$色番号.$B$10];2;0)" office:value-type="float" office:value="1" calcext:value-type="float">
            <text:p>1</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決起</text:p>
          </table:table-cell>
          <table:table-cell table:style-name="ce11" table:formula="of:=IFERROR(VLOOKUP([.$R246];[$能力語番号.$A$1:$能力語番号.$B$11];2;0);0)" office:value-type="float" office:value="4" calcext:value-type="float">
            <text:p>4</text:p>
          </table:table-cell>
          <table:table-cell table:formula="of:=NA()" office:value-type="string" office:string-value="" calcext:value-type="error">
            <text:p>#N/A</text:p>
          </table:table-cell>
          <table:table-cell table:style-name="ce11" table:formula="of:=IFERROR(VLOOKUP([.$T246];[$特性番号.$A$1:$特性番号.$B$8];2;0);0)" office:value-type="float" office:value="0" calcext:value-type="float">
            <text:p>0</text:p>
          </table:table-cell>
          <table:table-cell table:style-name="ce11"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table:style-name="ce11" office:value-type="float" office:value="8000" calcext:value-type="float">
            <text:p>8000</text:p>
          </table:table-cell>
          <table:table-cell table:style-name="ce25" office:value-type="string" calcext:value-type="string">
            <text:p>1ドローする</text:p>
          </table:table-cell>
          <table:table-cell table:style-name="ce11" table:formula="of:=IFERROR(VLOOKUP([.$X24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7.png</text:p>
          </table:table-cell>
          <table:table-cell table:style-name="ce11" table:formula="of:=CONCATENATE([$JSON.$A$1];[.$C246];[$JSON.$B$1];[.$E246];[$JSON.$C$1];[.F246];[$JSON.$D$1];[.$G246];[$JSON.$E$1];IF(ISNA([.$T246]);&quot;null&quot;;&quot;&quot;&quot;&quot;&amp;[.$T246]&amp;&quot;&quot;&quot;&quot;);[$JSON.$F$1];[.$V246];[$JSON.$G$1];IF(ISNA([.$X246]);&quot;null&quot;;&quot;&quot;&quot;&quot;&amp;[.$X246]&amp;&quot;&quot;&quot;&quot;);[$JSON.$H$1];[.$AA246];[$JSON.$I$1];[.$I246];[$JSON.$J$1];[.K246];[$JSON.$K$1];[.$M246];[$JSON.$L$1];[.$P246];[$JSON.$M$1];[.$O246];[$JSON.$N$1];[.$S246];[$JSON.$O$1];[.$U246];[$JSON.$P$1];IF(ISNA([.$W246]);&quot;null&quot;;[.$W246]);[$JSON.$Q$1];[.$Y246];[$JSON.$R$1];IF([.$Z246];&quot;true&quot;;&quot;false&quot;);[$JSON.$S$1];[.$A246];[$JSON.$T$1];[.$B246];[$JSON.$U$1])" office:value-type="string" office:string-value="{&quot;id&quot;:&quot;3-17&quot;,&quot;name&quot;:&quot;大塩平八郎&quot;,&quot;displayName&quot;:&quot;大塩平八郎&quot;,&quot;kana&quot;:&quot;おおしおへいはちろう&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rarity&quot;:1,&quot;type&quot;:1,&quot;level&quot;:8,&quot;color&quot;:1,&quot;term&quot;:4,&quot;trait&quot;:0,&quot;power&quot;:8000,&quot;legacy&quot;:4,&quot;anyNumCopies&quot;:false,&quot;orderTable&quot;:245,&quot;orderDeck&quot;:278}," calcext:value-type="string">
            <text:p>{"id":"3-17","name":"大塩平八郎","displayName":"大塩平八郎","kana":"おおしおへいはちろう","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rarity":1,"type":1,"level":8,"color":1,"term":4,"trait":0,"power":8000,"legacy":4,"anyNumCopies":false,"orderTable":245,"orderDeck":278},</text:p>
          </table:table-cell>
          <table:table-cell table:number-columns-repeated="16356"/>
        </table:table-row>
        <table:table-row table:style-name="ro2">
          <table:table-cell table:style-name="ce11" office:value-type="float" office:value="246" calcext:value-type="float">
            <text:p>246</text:p>
          </table:table-cell>
          <table:table-cell table:style-name="ce11" office:value-type="float" office:value="231" calcext:value-type="float">
            <text:p>231</text:p>
          </table:table-cell>
          <table:table-cell table:style-name="ce21" office:value-type="string" calcext:value-type="string">
            <text:p>3-18</text:p>
          </table:table-cell>
          <table:table-cell table:style-name="ce21" office:value-type="float" office:value="18" calcext:value-type="float">
            <text:p>18</text:p>
          </table:table-cell>
          <table:table-cell table:style-name="ce11" office:value-type="string" calcext:value-type="string">
            <text:p>水野忠邦</text:p>
          </table:table-cell>
          <table:table-cell table:style-name="ce11" table:formula="of:=[.E247]" office:value-type="string" office:string-value="水野忠邦" calcext:value-type="string">
            <text:p>水野忠邦</text:p>
          </table:table-cell>
          <table:table-cell table:style-name="ce11" office:value-type="string" calcext:value-type="string">
            <text:p>みずのただくに</text:p>
          </table:table-cell>
          <table:table-cell table:style-name="ce11" office:value-type="string" calcext:value-type="string">
            <text:p>第３弾ブースターパック</text:p>
          </table:table-cell>
          <table:table-cell table:style-name="ce11" table:formula="of:=VLOOKUP([.H247];[$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4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7];[$種類番号.$A$1:$種類番号.$B$4];2;0)" office:value-type="float" office:value="1" calcext:value-type="float">
            <text:p>1</text:p>
          </table:table-cell>
          <table:table-cell table:style-name="ce11" office:value-type="string" calcext:value-type="string">
            <text:p>赤</text:p>
          </table:table-cell>
          <table:table-cell table:style-name="ce11" table:formula="of:=VLOOKUP([.N247];[$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47];[$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24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8.png</text:p>
          </table:table-cell>
          <table:table-cell table:style-name="ce11" table:formula="of:=CONCATENATE([$JSON.$A$1];[.$C247];[$JSON.$B$1];[.$E247];[$JSON.$C$1];[.F247];[$JSON.$D$1];[.$G247];[$JSON.$E$1];IF(ISNA([.$T247]);&quot;null&quot;;&quot;&quot;&quot;&quot;&amp;[.$T247]&amp;&quot;&quot;&quot;&quot;);[$JSON.$F$1];[.$V247];[$JSON.$G$1];IF(ISNA([.$X247]);&quot;null&quot;;&quot;&quot;&quot;&quot;&amp;[.$X247]&amp;&quot;&quot;&quot;&quot;);[$JSON.$H$1];[.$AA247];[$JSON.$I$1];[.$I247];[$JSON.$J$1];[.K247];[$JSON.$K$1];[.$M247];[$JSON.$L$1];[.$P247];[$JSON.$M$1];[.$O247];[$JSON.$N$1];[.$S247];[$JSON.$O$1];[.$U247];[$JSON.$P$1];IF(ISNA([.$W247]);&quot;null&quot;;[.$W247]);[$JSON.$Q$1];[.$Y247];[$JSON.$R$1];IF([.$Z247];&quot;true&quot;;&quot;false&quot;);[$JSON.$S$1];[.$A247];[$JSON.$T$1];[.$B247];[$JSON.$U$1])" office:value-type="string" office:string-value="{&quot;id&quot;:&quot;3-18&quot;,&quot;name&quot;:&quot;水野忠邦&quot;,&quot;displayName&quot;:&quot;水野忠邦&quot;,&quot;kana&quot;:&quot;みずのただくに&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rarity&quot;:1,&quot;type&quot;:1,&quot;level&quot;:6,&quot;color&quot;:1,&quot;term&quot;:0,&quot;trait&quot;:0,&quot;power&quot;:5000,&quot;legacy&quot;:0,&quot;anyNumCopies&quot;:false,&quot;orderTable&quot;:246,&quot;orderDeck&quot;:231}," calcext:value-type="string">
            <text:p>{"id":"3-18","name":"水野忠邦","displayName":"水野忠邦","kana":"みずのただくに","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rarity":1,"type":1,"level":6,"color":1,"term":0,"trait":0,"power":5000,"legacy":0,"anyNumCopies":false,"orderTable":246,"orderDeck":231},</text:p>
          </table:table-cell>
          <table:table-cell table:number-columns-repeated="16356"/>
        </table:table-row>
        <table:table-row table:style-name="ro2">
          <table:table-cell table:style-name="ce11" office:value-type="float" office:value="247" calcext:value-type="float">
            <text:p>247</text:p>
          </table:table-cell>
          <table:table-cell table:style-name="ce11" office:value-type="float" office:value="279" calcext:value-type="float">
            <text:p>279</text:p>
          </table:table-cell>
          <table:table-cell table:style-name="ce21" office:value-type="string" calcext:value-type="string">
            <text:p>3-19</text:p>
          </table:table-cell>
          <table:table-cell table:style-name="ce21" office:value-type="float" office:value="19" calcext:value-type="float">
            <text:p>19</text:p>
          </table:table-cell>
          <table:table-cell table:style-name="ce11" office:value-type="string" calcext:value-type="string">
            <text:p>伊達政宗</text:p>
          </table:table-cell>
          <table:table-cell table:style-name="ce11" table:formula="of:=[.E248]" office:value-type="string" office:string-value="伊達政宗" calcext:value-type="string">
            <text:p>伊達政宗</text:p>
          </table:table-cell>
          <table:table-cell table:style-name="ce11" office:value-type="string" calcext:value-type="string">
            <text:p>だてまさむね</text:p>
          </table:table-cell>
          <table:table-cell table:style-name="ce11" office:value-type="string" calcext:value-type="string">
            <text:p>第３弾ブースターパック</text:p>
          </table:table-cell>
          <table:table-cell table:style-name="ce11" table:formula="of:=VLOOKUP([.H248];[$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4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48];[$種類番号.$A$1:$種類番号.$B$4];2;0)" office:value-type="float" office:value="1" calcext:value-type="float">
            <text:p>1</text:p>
          </table:table-cell>
          <table:table-cell table:style-name="ce11" office:value-type="string" calcext:value-type="string">
            <text:p>青</text:p>
          </table:table-cell>
          <table:table-cell table:style-name="ce11" table:formula="of:=VLOOKUP([.N248];[$色番号.$A$1:$色番号.$B$10];2;0)" office:value-type="float" office:value="2" calcext:value-type="float">
            <text:p>2</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48];[$能力語番号.$A$1:$能力語番号.$B$11];2;0);0)" office:value-type="float" office:value="0" calcext:value-type="float">
            <text:p>0</text:p>
          </table:table-cell>
          <table:table-cell office:value-type="string" calcext:value-type="string">
            <text:p>剣術</text:p>
          </table:table-cell>
          <table:table-cell table:style-name="ce11" table:formula="of:=IFERROR(VLOOKUP([.$T248];[$特性番号.$A$1:$特性番号.$B$8];2;0);0)" office:value-type="float" office:value="1" calcext:value-type="float">
            <text:p>1</text:p>
          </table:table-cell>
          <table:table-cell table:style-name="ce11" office:value-type="string" calcext:value-type="string">
            <text:p>装備していない間、ブロッカーになれない。¶戦場の「剣術」イジン1体につき「ブロック+1000」を得る。</text:p>
          </table:table-cell>
          <table:table-cell table:style-name="ce11" office:value-type="float" office:value="8000" calcext:value-type="float">
            <text:p>8000</text:p>
          </table:table-cell>
          <table:table-cell table:style-name="ce25" office:value-type="string" calcext:value-type="string">
            <text:p>反魂</text:p>
          </table:table-cell>
          <table:table-cell table:style-name="ce11" table:formula="of:=IFERROR(VLOOKUP([.$X248];[$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19.png</text:p>
          </table:table-cell>
          <table:table-cell table:style-name="ce11" table:formula="of:=CONCATENATE([$JSON.$A$1];[.$C248];[$JSON.$B$1];[.$E248];[$JSON.$C$1];[.F248];[$JSON.$D$1];[.$G248];[$JSON.$E$1];IF(ISNA([.$T248]);&quot;null&quot;;&quot;&quot;&quot;&quot;&amp;[.$T248]&amp;&quot;&quot;&quot;&quot;);[$JSON.$F$1];[.$V248];[$JSON.$G$1];IF(ISNA([.$X248]);&quot;null&quot;;&quot;&quot;&quot;&quot;&amp;[.$X248]&amp;&quot;&quot;&quot;&quot;);[$JSON.$H$1];[.$AA248];[$JSON.$I$1];[.$I248];[$JSON.$J$1];[.K248];[$JSON.$K$1];[.$M248];[$JSON.$L$1];[.$P248];[$JSON.$M$1];[.$O248];[$JSON.$N$1];[.$S248];[$JSON.$O$1];[.$U248];[$JSON.$P$1];IF(ISNA([.$W248]);&quot;null&quot;;[.$W248]);[$JSON.$Q$1];[.$Y248];[$JSON.$R$1];IF([.$Z248];&quot;true&quot;;&quot;false&quot;);[$JSON.$S$1];[.$A248];[$JSON.$T$1];[.$B248];[$JSON.$U$1])" office:value-type="string" office:string-value="{&quot;id&quot;:&quot;3-19&quot;,&quot;name&quot;:&quot;伊達政宗&quot;,&quot;displayName&quot;:&quot;伊達政宗&quot;,&quot;kana&quot;:&quot;だてまさむね&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rarity&quot;:2,&quot;type&quot;:1,&quot;level&quot;:8,&quot;color&quot;:2,&quot;term&quot;:0,&quot;trait&quot;:1,&quot;power&quot;:8000,&quot;legacy&quot;:6,&quot;anyNumCopies&quot;:false,&quot;orderTable&quot;:247,&quot;orderDeck&quot;:279}," calcext:value-type="string">
            <text:p>{"id":"3-19","name":"伊達政宗","displayName":"伊達政宗","kana":"だてまさむね","traitText":"剣術","ruleText":"装備していない間、ブロッカーになれない。¶戦場の「剣術」イジン1体につき「ブロック+1000」を得る。","legacyText":"反魂","imageUrl":"https://one-draw.jp/ijinden/cardlist/003/card/03_019.png","expansion":35,"rarity":2,"type":1,"level":8,"color":2,"term":0,"trait":1,"power":8000,"legacy":6,"anyNumCopies":false,"orderTable":247,"orderDeck":279},</text:p>
          </table:table-cell>
          <table:table-cell table:number-columns-repeated="16356"/>
        </table:table-row>
        <table:table-row table:style-name="ro2">
          <table:table-cell table:style-name="ce11" office:value-type="float" office:value="248" calcext:value-type="float">
            <text:p>248</text:p>
          </table:table-cell>
          <table:table-cell table:style-name="ce11" office:value-type="float" office:value="239" calcext:value-type="float">
            <text:p>239</text:p>
          </table:table-cell>
          <table:table-cell table:style-name="ce21" office:value-type="string" calcext:value-type="string">
            <text:p>3-20</text:p>
          </table:table-cell>
          <table:table-cell table:style-name="ce21" office:value-type="float" office:value="20" calcext:value-type="float">
            <text:p>20</text:p>
          </table:table-cell>
          <table:table-cell table:style-name="ce11" office:value-type="string" calcext:value-type="string">
            <text:p>バルトロメウ=ディアス</text:p>
          </table:table-cell>
          <table:table-cell table:style-name="ce11" table:formula="of:=[.E249]" office:value-type="string" office:string-value="バルトロメウ=ディアス" calcext:value-type="string">
            <text:p>バルトロメウ=ディアス</text:p>
          </table:table-cell>
          <table:table-cell table:style-name="ce11" office:value-type="string" calcext:value-type="string">
            <text:p>ばるとろめうでぃあす</text:p>
          </table:table-cell>
          <table:table-cell table:style-name="ce11" office:value-type="string" calcext:value-type="string">
            <text:p>第３弾ブースターパック</text:p>
          </table:table-cell>
          <table:table-cell table:style-name="ce11" table:formula="of:=VLOOKUP([.H249];[$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49];[$種類番号.$A$1:$種類番号.$B$4];2;0)" office:value-type="float" office:value="1" calcext:value-type="float">
            <text:p>1</text:p>
          </table:table-cell>
          <table:table-cell table:style-name="ce11" office:value-type="string" calcext:value-type="string">
            <text:p>青</text:p>
          </table:table-cell>
          <table:table-cell table:style-name="ce11" table:formula="of:=VLOOKUP([.N249];[$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49];[$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249];[$特性番号.$A$1:$特性番号.$B$8];2;0);0)" office:value-type="float" office:value="0" calcext:value-type="float">
            <text:p>0</text:p>
          </table:table-cell>
          <table:table-cell table:style-name="ce11" office:value-type="string" calcext:value-type="string">
            <text:p>航海 - アタッカーになったとき、戦場のイジン1体か、戦場のハイケイ1つを手札に戻す。</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4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0.png</text:p>
          </table:table-cell>
          <table:table-cell table:style-name="ce11" table:formula="of:=CONCATENATE([$JSON.$A$1];[.$C249];[$JSON.$B$1];[.$E249];[$JSON.$C$1];[.F249];[$JSON.$D$1];[.$G249];[$JSON.$E$1];IF(ISNA([.$T249]);&quot;null&quot;;&quot;&quot;&quot;&quot;&amp;[.$T249]&amp;&quot;&quot;&quot;&quot;);[$JSON.$F$1];[.$V249];[$JSON.$G$1];IF(ISNA([.$X249]);&quot;null&quot;;&quot;&quot;&quot;&quot;&amp;[.$X249]&amp;&quot;&quot;&quot;&quot;);[$JSON.$H$1];[.$AA249];[$JSON.$I$1];[.$I249];[$JSON.$J$1];[.K249];[$JSON.$K$1];[.$M249];[$JSON.$L$1];[.$P249];[$JSON.$M$1];[.$O249];[$JSON.$N$1];[.$S249];[$JSON.$O$1];[.$U249];[$JSON.$P$1];IF(ISNA([.$W249]);&quot;null&quot;;[.$W249]);[$JSON.$Q$1];[.$Y249];[$JSON.$R$1];IF([.$Z249];&quot;true&quot;;&quot;false&quot;);[$JSON.$S$1];[.$A249];[$JSON.$T$1];[.$B249];[$JSON.$U$1])" office:value-type="string" office:string-value="{&quot;id&quot;:&quot;3-20&quot;,&quot;name&quot;:&quot;バルトロメウ=ディアス&quot;,&quot;displayName&quot;:&quot;バルトロメウ=ディアス&quot;,&quot;kana&quot;:&quot;ばるとろめうでぃあす&quot;,&quot;traitText&quot;:null,&quot;ruleText&quot;:&quot;航海 - アタッカーになったとき、戦場のイジン1体か、戦場のハイケイ1つを手札に戻す。&quot;,&quot;legacyText&quot;:null,&quot;imageUrl&quot;:&quot;https://one-draw.jp/ijinden/cardlist/003/card/03_020.png&quot;,&quot;expansion&quot;:35,&quot;rarity&quot;:1,&quot;type&quot;:1,&quot;level&quot;:6,&quot;color&quot;:2,&quot;term&quot;:1,&quot;trait&quot;:0,&quot;power&quot;:3000,&quot;legacy&quot;:0,&quot;anyNumCopies&quot;:false,&quot;orderTable&quot;:248,&quot;orderDeck&quot;:239}," calcext:value-type="string">
            <text:p>{"id":"3-20","name":"バルトロメウ=ディアス","displayName":"バルトロメウ=ディアス","kana":"ばるとろめうでぃあす","traitText":null,"ruleText":"航海 - アタッカーになったとき、戦場のイジン1体か、戦場のハイケイ1つを手札に戻す。","legacyText":null,"imageUrl":"https://one-draw.jp/ijinden/cardlist/003/card/03_020.png","expansion":35,"rarity":1,"type":1,"level":6,"color":2,"term":1,"trait":0,"power":3000,"legacy":0,"anyNumCopies":false,"orderTable":248,"orderDeck":239},</text:p>
          </table:table-cell>
          <table:table-cell table:number-columns-repeated="16356"/>
        </table:table-row>
        <table:table-row table:style-name="ro2">
          <table:table-cell table:style-name="ce11" office:value-type="float" office:value="249" calcext:value-type="float">
            <text:p>249</text:p>
          </table:table-cell>
          <table:table-cell table:style-name="ce11" office:value-type="float" office:value="10" calcext:value-type="float">
            <text:p>10</text:p>
          </table:table-cell>
          <table:table-cell table:style-name="ce21" office:value-type="string" calcext:value-type="string">
            <text:p>3-21</text:p>
          </table:table-cell>
          <table:table-cell table:style-name="ce21" office:value-type="float" office:value="21" calcext:value-type="float">
            <text:p>21</text:p>
          </table:table-cell>
          <table:table-cell table:style-name="ce11" office:value-type="string" calcext:value-type="string">
            <text:p>木戸孝允</text:p>
          </table:table-cell>
          <table:table-cell table:style-name="ce11" table:formula="of:=[.E250]" office:value-type="string" office:string-value="木戸孝允" calcext:value-type="string">
            <text:p>木戸孝允</text:p>
          </table:table-cell>
          <table:table-cell table:style-name="ce11" office:value-type="string" calcext:value-type="string">
            <text:p>きどたかよし</text:p>
          </table:table-cell>
          <table:table-cell table:style-name="ce11" office:value-type="string" calcext:value-type="string">
            <text:p>第３弾ブースターパック</text:p>
          </table:table-cell>
          <table:table-cell table:style-name="ce11" table:formula="of:=VLOOKUP([.H250];[$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0];[$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0];[$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0];[$能力語番号.$A$1:$能力語番号.$B$11];2;0);0)" office:value-type="float" office:value="0" calcext:value-type="float">
            <text:p>0</text:p>
          </table:table-cell>
          <table:table-cell office:value-type="string" calcext:value-type="string">
            <text:p>思想</text:p>
          </table:table-cell>
          <table:table-cell table:style-name="ce11" table:formula="of:=IFERROR(VLOOKUP([.$T250];[$特性番号.$A$1:$特性番号.$B$8];2;0);0)" office:value-type="float" office:value="8" calcext:value-type="float">
            <text:p>8</text:p>
          </table:table-cell>
          <table:table-cell table:style-name="ce11" office:value-type="string" calcext:value-type="string">
            <text:p>スタンド</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5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1.png</text:p>
          </table:table-cell>
          <table:table-cell table:style-name="ce11" table:formula="of:=CONCATENATE([$JSON.$A$1];[.$C250];[$JSON.$B$1];[.$E250];[$JSON.$C$1];[.F250];[$JSON.$D$1];[.$G250];[$JSON.$E$1];IF(ISNA([.$T250]);&quot;null&quot;;&quot;&quot;&quot;&quot;&amp;[.$T250]&amp;&quot;&quot;&quot;&quot;);[$JSON.$F$1];[.$V250];[$JSON.$G$1];IF(ISNA([.$X250]);&quot;null&quot;;&quot;&quot;&quot;&quot;&amp;[.$X250]&amp;&quot;&quot;&quot;&quot;);[$JSON.$H$1];[.$AA250];[$JSON.$I$1];[.$I250];[$JSON.$J$1];[.K250];[$JSON.$K$1];[.$M250];[$JSON.$L$1];[.$P250];[$JSON.$M$1];[.$O250];[$JSON.$N$1];[.$S250];[$JSON.$O$1];[.$U250];[$JSON.$P$1];IF(ISNA([.$W250]);&quot;null&quot;;[.$W250]);[$JSON.$Q$1];[.$Y250];[$JSON.$R$1];IF([.$Z250];&quot;true&quot;;&quot;false&quot;);[$JSON.$S$1];[.$A250];[$JSON.$T$1];[.$B250];[$JSON.$U$1])" office:value-type="string" office:string-value="{&quot;id&quot;:&quot;3-21&quot;,&quot;name&quot;:&quot;木戸孝允&quot;,&quot;displayName&quot;:&quot;木戸孝允&quot;,&quot;kana&quot;:&quot;きどたかよし&quot;,&quot;traitText&quot;:&quot;思想&quot;,&quot;ruleText&quot;:&quot;スタンド&quot;,&quot;legacyText&quot;:&quot;1ドローする&quot;,&quot;imageUrl&quot;:&quot;https://one-draw.jp/ijinden/cardlist/003/card/03_021.png&quot;,&quot;expansion&quot;:35,&quot;rarity&quot;:1,&quot;type&quot;:1,&quot;level&quot;:1,&quot;color&quot;:2,&quot;term&quot;:0,&quot;trait&quot;:8,&quot;power&quot;:1000,&quot;legacy&quot;:4,&quot;anyNumCopies&quot;:false,&quot;orderTable&quot;:249,&quot;orderDeck&quot;:10}," calcext:value-type="string">
            <text:p>{"id":"3-21","name":"木戸孝允","displayName":"木戸孝允","kana":"きどたかよし","traitText":"思想","ruleText":"スタンド","legacyText":"1ドローする","imageUrl":"https://one-draw.jp/ijinden/cardlist/003/card/03_021.png","expansion":35,"rarity":1,"type":1,"level":1,"color":2,"term":0,"trait":8,"power":1000,"legacy":4,"anyNumCopies":false,"orderTable":249,"orderDeck":10},</text:p>
          </table:table-cell>
          <table:table-cell table:number-columns-repeated="16356"/>
        </table:table-row>
        <table:table-row table:style-name="ro2">
          <table:table-cell table:style-name="ce11" office:value-type="float" office:value="250" calcext:value-type="float">
            <text:p>250</text:p>
          </table:table-cell>
          <table:table-cell table:style-name="ce11" office:value-type="float" office:value="49" calcext:value-type="float">
            <text:p>49</text:p>
          </table:table-cell>
          <table:table-cell table:style-name="ce21" office:value-type="string" calcext:value-type="string">
            <text:p>3-22</text:p>
          </table:table-cell>
          <table:table-cell table:style-name="ce21" office:value-type="float" office:value="22" calcext:value-type="float">
            <text:p>22</text:p>
          </table:table-cell>
          <table:table-cell table:style-name="ce11" office:value-type="string" calcext:value-type="string">
            <text:p>高杉晋作</text:p>
          </table:table-cell>
          <table:table-cell table:style-name="ce11" table:formula="of:=[.E251]" office:value-type="string" office:string-value="高杉晋作" calcext:value-type="string">
            <text:p>高杉晋作</text:p>
          </table:table-cell>
          <table:table-cell table:style-name="ce11" office:value-type="string" calcext:value-type="string">
            <text:p>たかすぎしんさく</text:p>
          </table:table-cell>
          <table:table-cell table:style-name="ce11" office:value-type="string" calcext:value-type="string">
            <text:p>第３弾ブースターパック</text:p>
          </table:table-cell>
          <table:table-cell table:style-name="ce11" table:formula="of:=VLOOKUP([.H251];[$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5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51];[$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1];[$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徴募</text:p>
          </table:table-cell>
          <table:table-cell table:style-name="ce11" table:formula="of:=IFERROR(VLOOKUP([.$R251];[$能力語番号.$A$1:$能力語番号.$B$11];2;0);0)" office:value-type="float" office:value="8" calcext:value-type="float">
            <text:p>8</text:p>
          </table:table-cell>
          <table:table-cell office:value-type="string" calcext:value-type="string">
            <text:p>思想</text:p>
          </table:table-cell>
          <table:table-cell table:style-name="ce11" table:formula="of:=IFERROR(VLOOKUP([.$T251];[$特性番号.$A$1:$特性番号.$B$8];2;0);0)" office:value-type="float" office:value="8" calcext:value-type="float">
            <text:p>8</text:p>
          </table:table-cell>
          <table:table-cell table:style-name="ce11"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5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2.png</text:p>
          </table:table-cell>
          <table:table-cell table:style-name="ce11" table:formula="of:=CONCATENATE([$JSON.$A$1];[.$C251];[$JSON.$B$1];[.$E251];[$JSON.$C$1];[.F251];[$JSON.$D$1];[.$G251];[$JSON.$E$1];IF(ISNA([.$T251]);&quot;null&quot;;&quot;&quot;&quot;&quot;&amp;[.$T251]&amp;&quot;&quot;&quot;&quot;);[$JSON.$F$1];[.$V251];[$JSON.$G$1];IF(ISNA([.$X251]);&quot;null&quot;;&quot;&quot;&quot;&quot;&amp;[.$X251]&amp;&quot;&quot;&quot;&quot;);[$JSON.$H$1];[.$AA251];[$JSON.$I$1];[.$I251];[$JSON.$J$1];[.K251];[$JSON.$K$1];[.$M251];[$JSON.$L$1];[.$P251];[$JSON.$M$1];[.$O251];[$JSON.$N$1];[.$S251];[$JSON.$O$1];[.$U251];[$JSON.$P$1];IF(ISNA([.$W251]);&quot;null&quot;;[.$W251]);[$JSON.$Q$1];[.$Y251];[$JSON.$R$1];IF([.$Z251];&quot;true&quot;;&quot;false&quot;);[$JSON.$S$1];[.$A251];[$JSON.$T$1];[.$B251];[$JSON.$U$1])" office:value-type="string" office:string-value="{&quot;id&quot;:&quot;3-22&quot;,&quot;name&quot;:&quot;高杉晋作&quot;,&quot;displayName&quot;:&quot;高杉晋作&quot;,&quot;kana&quot;:&quot;たかすぎしんさく&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rarity&quot;:2,&quot;type&quot;:1,&quot;level&quot;:2,&quot;color&quot;:2,&quot;term&quot;:8,&quot;trait&quot;:8,&quot;power&quot;:2000,&quot;legacy&quot;:0,&quot;anyNumCopies&quot;:false,&quot;orderTable&quot;:250,&quot;orderDeck&quot;:49}," calcext:value-type="string">
            <text:p>{"id":"3-22","name":"高杉晋作","displayName":"高杉晋作","kana":"たかすぎしんさく","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rarity":2,"type":1,"level":2,"color":2,"term":8,"trait":8,"power":2000,"legacy":0,"anyNumCopies":false,"orderTable":250,"orderDeck":49},</text:p>
          </table:table-cell>
          <table:table-cell table:number-columns-repeated="16356"/>
        </table:table-row>
        <table:table-row table:style-name="ro2">
          <table:table-cell table:style-name="ce11" office:value-type="float" office:value="251" calcext:value-type="float">
            <text:p>251</text:p>
          </table:table-cell>
          <table:table-cell table:style-name="ce11" office:value-type="float" office:value="152" calcext:value-type="float">
            <text:p>152</text:p>
          </table:table-cell>
          <table:table-cell table:style-name="ce21" office:value-type="string" calcext:value-type="string">
            <text:p>3-23</text:p>
          </table:table-cell>
          <table:table-cell table:style-name="ce21" office:value-type="float" office:value="23" calcext:value-type="float">
            <text:p>23</text:p>
          </table:table-cell>
          <table:table-cell table:style-name="ce11" office:value-type="string" calcext:value-type="string">
            <text:p>トマス・ニューコメン</text:p>
          </table:table-cell>
          <table:table-cell table:style-name="ce11" table:formula="of:=[.E252]" office:value-type="string" office:string-value="トマス・ニューコメン" calcext:value-type="string">
            <text:p>トマス・ニューコメン</text:p>
          </table:table-cell>
          <table:table-cell table:style-name="ce11" office:value-type="string" calcext:value-type="string">
            <text:p>とますにゅーこめん</text:p>
          </table:table-cell>
          <table:table-cell table:style-name="ce11" office:value-type="string" calcext:value-type="string">
            <text:p>第３弾ブースターパック</text:p>
          </table:table-cell>
          <table:table-cell table:style-name="ce11" table:formula="of:=VLOOKUP([.H252];[$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5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2];[$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2];[$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52];[$特性番号.$A$1:$特性番号.$B$8];2;0);0)" office:value-type="float" office:value="0" calcext:value-type="float">
            <text:p>0</text:p>
          </table:table-cell>
          <table:table-cell table:style-name="ce11"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5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3.png</text:p>
          </table:table-cell>
          <table:table-cell table:style-name="ce11" table:formula="of:=CONCATENATE([$JSON.$A$1];[.$C252];[$JSON.$B$1];[.$E252];[$JSON.$C$1];[.F252];[$JSON.$D$1];[.$G252];[$JSON.$E$1];IF(ISNA([.$T252]);&quot;null&quot;;&quot;&quot;&quot;&quot;&amp;[.$T252]&amp;&quot;&quot;&quot;&quot;);[$JSON.$F$1];[.$V252];[$JSON.$G$1];IF(ISNA([.$X252]);&quot;null&quot;;&quot;&quot;&quot;&quot;&amp;[.$X252]&amp;&quot;&quot;&quot;&quot;);[$JSON.$H$1];[.$AA252];[$JSON.$I$1];[.$I252];[$JSON.$J$1];[.K252];[$JSON.$K$1];[.$M252];[$JSON.$L$1];[.$P252];[$JSON.$M$1];[.$O252];[$JSON.$N$1];[.$S252];[$JSON.$O$1];[.$U252];[$JSON.$P$1];IF(ISNA([.$W252]);&quot;null&quot;;[.$W252]);[$JSON.$Q$1];[.$Y252];[$JSON.$R$1];IF([.$Z252];&quot;true&quot;;&quot;false&quot;);[$JSON.$S$1];[.$A252];[$JSON.$T$1];[.$B252];[$JSON.$U$1])" office:value-type="string" office:string-value="{&quot;id&quot;:&quot;3-23&quot;,&quot;name&quot;:&quot;トマス・ニューコメン&quot;,&quot;displayName&quot;:&quot;トマス・ニューコメン&quot;,&quot;kana&quot;:&quot;とますにゅーこめん&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rarity&quot;:1,&quot;type&quot;:1,&quot;level&quot;:4,&quot;color&quot;:2,&quot;term&quot;:0,&quot;trait&quot;:0,&quot;power&quot;:2000,&quot;legacy&quot;:4,&quot;anyNumCopies&quot;:false,&quot;orderTable&quot;:251,&quot;orderDeck&quot;:152}," calcext:value-type="string">
            <text:p>{"id":"3-23","name":"トマス・ニューコメン","displayName":"トマス・ニューコメン","kana":"とますにゅーこめん","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rarity":1,"type":1,"level":4,"color":2,"term":0,"trait":0,"power":2000,"legacy":4,"anyNumCopies":false,"orderTable":251,"orderDeck":152},</text:p>
          </table:table-cell>
          <table:table-cell table:number-columns-repeated="16356"/>
        </table:table-row>
        <table:table-row table:style-name="ro2">
          <table:table-cell table:style-name="ce11" office:value-type="float" office:value="252" calcext:value-type="float">
            <text:p>252</text:p>
          </table:table-cell>
          <table:table-cell table:style-name="ce11" office:value-type="float" office:value="202" calcext:value-type="float">
            <text:p>202</text:p>
          </table:table-cell>
          <table:table-cell table:style-name="ce21" office:value-type="string" calcext:value-type="string">
            <text:p>3-24</text:p>
          </table:table-cell>
          <table:table-cell table:style-name="ce21" office:value-type="float" office:value="24" calcext:value-type="float">
            <text:p>24</text:p>
          </table:table-cell>
          <table:table-cell table:style-name="ce11" office:value-type="string" calcext:value-type="string">
            <text:p>アダム・ラクスマン</text:p>
          </table:table-cell>
          <table:table-cell table:style-name="ce11" table:formula="of:=[.E253]" office:value-type="string" office:string-value="アダム・ラクスマン" calcext:value-type="string">
            <text:p>アダム・ラクスマン</text:p>
          </table:table-cell>
          <table:table-cell table:style-name="ce11" office:value-type="string" calcext:value-type="string">
            <text:p>あだむらくすまん</text:p>
          </table:table-cell>
          <table:table-cell table:style-name="ce11" office:value-type="string" calcext:value-type="string">
            <text:p>第３弾ブースターパック</text:p>
          </table:table-cell>
          <table:table-cell table:style-name="ce11" table:formula="of:=VLOOKUP([.H253];[$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5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3];[$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53];[$特性番号.$A$1:$特性番号.$B$8];2;0);0)" office:value-type="float" office:value="0" calcext:value-type="float">
            <text:p>0</text:p>
          </table:table-cell>
          <table:table-cell table:style-name="ce11"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5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4.png</text:p>
          </table:table-cell>
          <table:table-cell table:style-name="ce11" table:formula="of:=CONCATENATE([$JSON.$A$1];[.$C253];[$JSON.$B$1];[.$E253];[$JSON.$C$1];[.F253];[$JSON.$D$1];[.$G253];[$JSON.$E$1];IF(ISNA([.$T253]);&quot;null&quot;;&quot;&quot;&quot;&quot;&amp;[.$T253]&amp;&quot;&quot;&quot;&quot;);[$JSON.$F$1];[.$V253];[$JSON.$G$1];IF(ISNA([.$X253]);&quot;null&quot;;&quot;&quot;&quot;&quot;&amp;[.$X253]&amp;&quot;&quot;&quot;&quot;);[$JSON.$H$1];[.$AA253];[$JSON.$I$1];[.$I253];[$JSON.$J$1];[.K253];[$JSON.$K$1];[.$M253];[$JSON.$L$1];[.$P253];[$JSON.$M$1];[.$O253];[$JSON.$N$1];[.$S253];[$JSON.$O$1];[.$U253];[$JSON.$P$1];IF(ISNA([.$W253]);&quot;null&quot;;[.$W253]);[$JSON.$Q$1];[.$Y253];[$JSON.$R$1];IF([.$Z253];&quot;true&quot;;&quot;false&quot;);[$JSON.$S$1];[.$A253];[$JSON.$T$1];[.$B253];[$JSON.$U$1])" office:value-type="string" office:string-value="{&quot;id&quot;:&quot;3-24&quot;,&quot;name&quot;:&quot;アダム・ラクスマン&quot;,&quot;displayName&quot;:&quot;アダム・ラクスマン&quot;,&quot;kana&quot;:&quot;あだむらくすまん&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rarity&quot;:1,&quot;type&quot;:1,&quot;level&quot;:5,&quot;color&quot;:2,&quot;term&quot;:0,&quot;trait&quot;:0,&quot;power&quot;:3000,&quot;legacy&quot;:0,&quot;anyNumCopies&quot;:false,&quot;orderTable&quot;:252,&quot;orderDeck&quot;:202}," calcext:value-type="string">
            <text:p>{"id":"3-24","name":"アダム・ラクスマン","displayName":"アダム・ラクスマン","kana":"あだむらくすまん","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rarity":1,"type":1,"level":5,"color":2,"term":0,"trait":0,"power":3000,"legacy":0,"anyNumCopies":false,"orderTable":252,"orderDeck":202},</text:p>
          </table:table-cell>
          <table:table-cell table:number-columns-repeated="16356"/>
        </table:table-row>
        <table:table-row table:style-name="ro2">
          <table:table-cell table:style-name="ce11" office:value-type="float" office:value="253" calcext:value-type="float">
            <text:p>253</text:p>
          </table:table-cell>
          <table:table-cell table:style-name="ce11" office:value-type="float" office:value="50" calcext:value-type="float">
            <text:p>50</text:p>
          </table:table-cell>
          <table:table-cell table:style-name="ce21" office:value-type="string" calcext:value-type="string">
            <text:p>3-25</text:p>
          </table:table-cell>
          <table:table-cell table:style-name="ce21" office:value-type="float" office:value="25" calcext:value-type="float">
            <text:p>25</text:p>
          </table:table-cell>
          <table:table-cell table:style-name="ce11" office:value-type="string" calcext:value-type="string">
            <text:p>大黒屋光太夫</text:p>
          </table:table-cell>
          <table:table-cell table:style-name="ce11" table:formula="of:=[.E254]" office:value-type="string" office:string-value="大黒屋光太夫" calcext:value-type="string">
            <text:p>大黒屋光太夫</text:p>
          </table:table-cell>
          <table:table-cell table:style-name="ce11" office:value-type="string" calcext:value-type="string">
            <text:p>だいこくやこうだゆう</text:p>
          </table:table-cell>
          <table:table-cell table:style-name="ce11" office:value-type="string" calcext:value-type="string">
            <text:p>第３弾ブースターパック</text:p>
          </table:table-cell>
          <table:table-cell table:style-name="ce11" table:formula="of:=VLOOKUP([.H254];[$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5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4];[$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4];[$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54];[$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254];[$特性番号.$A$1:$特性番号.$B$8];2;0);0)" office:value-type="float" office:value="0" calcext:value-type="float">
            <text:p>0</text:p>
          </table:table-cell>
          <table:table-cell table:style-name="ce11" office:value-type="string" calcext:value-type="string">
            <text:p>航海 - アタッカーになったとき、相手の魔力ゾーンの裏のカード1つを指定して発動できる。そのカードと、これを手札に戻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5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5.png</text:p>
          </table:table-cell>
          <table:table-cell table:style-name="ce11" table:formula="of:=CONCATENATE([$JSON.$A$1];[.$C254];[$JSON.$B$1];[.$E254];[$JSON.$C$1];[.F254];[$JSON.$D$1];[.$G254];[$JSON.$E$1];IF(ISNA([.$T254]);&quot;null&quot;;&quot;&quot;&quot;&quot;&amp;[.$T254]&amp;&quot;&quot;&quot;&quot;);[$JSON.$F$1];[.$V254];[$JSON.$G$1];IF(ISNA([.$X254]);&quot;null&quot;;&quot;&quot;&quot;&quot;&amp;[.$X254]&amp;&quot;&quot;&quot;&quot;);[$JSON.$H$1];[.$AA254];[$JSON.$I$1];[.$I254];[$JSON.$J$1];[.K254];[$JSON.$K$1];[.$M254];[$JSON.$L$1];[.$P254];[$JSON.$M$1];[.$O254];[$JSON.$N$1];[.$S254];[$JSON.$O$1];[.$U254];[$JSON.$P$1];IF(ISNA([.$W254]);&quot;null&quot;;[.$W254]);[$JSON.$Q$1];[.$Y254];[$JSON.$R$1];IF([.$Z254];&quot;true&quot;;&quot;false&quot;);[$JSON.$S$1];[.$A254];[$JSON.$T$1];[.$B254];[$JSON.$U$1])" office:value-type="string" office:string-value="{&quot;id&quot;:&quot;3-25&quot;,&quot;name&quot;:&quot;大黒屋光太夫&quot;,&quot;displayName&quot;:&quot;大黒屋光太夫&quot;,&quot;kana&quot;:&quot;だいこくやこうだゆう&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rarity&quot;:1,&quot;type&quot;:1,&quot;level&quot;:2,&quot;color&quot;:2,&quot;term&quot;:1,&quot;trait&quot;:0,&quot;power&quot;:2000,&quot;legacy&quot;:4,&quot;anyNumCopies&quot;:false,&quot;orderTable&quot;:253,&quot;orderDeck&quot;:50}," calcext:value-type="string">
            <text:p>{"id":"3-25","name":"大黒屋光太夫","displayName":"大黒屋光太夫","kana":"だいこくやこうだゆう","traitText":null,"ruleText":"航海 - アタッカーになったとき、相手の魔力ゾーンの裏のカード1つを指定して発動できる。そのカードと、これを手札に戻す。","legacyText":"1ドローする","imageUrl":"https://one-draw.jp/ijinden/cardlist/003/card/03_025.png","expansion":35,"rarity":1,"type":1,"level":2,"color":2,"term":1,"trait":0,"power":2000,"legacy":4,"anyNumCopies":false,"orderTable":253,"orderDeck":50},</text:p>
          </table:table-cell>
          <table:table-cell table:number-columns-repeated="16356"/>
        </table:table-row>
        <table:table-row table:style-name="ro2">
          <table:table-cell table:style-name="ce11" office:value-type="float" office:value="254" calcext:value-type="float">
            <text:p>254</text:p>
          </table:table-cell>
          <table:table-cell table:style-name="ce11" office:value-type="float" office:value="11" calcext:value-type="float">
            <text:p>11</text:p>
          </table:table-cell>
          <table:table-cell table:style-name="ce21" office:value-type="string" calcext:value-type="string">
            <text:p>3-26</text:p>
          </table:table-cell>
          <table:table-cell table:style-name="ce21" office:value-type="float" office:value="26" calcext:value-type="float">
            <text:p>26</text:p>
          </table:table-cell>
          <table:table-cell table:style-name="ce11" office:value-type="string" calcext:value-type="string">
            <text:p>ニコライ・レザノフ</text:p>
          </table:table-cell>
          <table:table-cell table:style-name="ce11" table:formula="of:=[.E255]" office:value-type="string" office:string-value="ニコライ・レザノフ" calcext:value-type="string">
            <text:p>ニコライ・レザノフ</text:p>
          </table:table-cell>
          <table:table-cell table:style-name="ce11" office:value-type="string" calcext:value-type="string">
            <text:p>にこらいれざのふ</text:p>
          </table:table-cell>
          <table:table-cell table:style-name="ce11" office:value-type="string" calcext:value-type="string">
            <text:p>第３弾ブースターパック</text:p>
          </table:table-cell>
          <table:table-cell table:style-name="ce11" table:formula="of:=VLOOKUP([.H255];[$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5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5];[$種類番号.$A$1:$種類番号.$B$4];2;0)" office:value-type="float" office:value="1" calcext:value-type="float">
            <text:p>1</text:p>
          </table:table-cell>
          <table:table-cell table:style-name="ce11" office:value-type="string" calcext:value-type="string">
            <text:p>青</text:p>
          </table:table-cell>
          <table:table-cell table:style-name="ce11" table:formula="of:=VLOOKUP([.N255];[$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55];[$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255];[$特性番号.$A$1:$特性番号.$B$8];2;0);0)" office:value-type="float" office:value="0" calcext:value-type="float">
            <text:p>0</text:p>
          </table:table-cell>
          <table:table-cell table:style-name="ce11"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6.png</text:p>
          </table:table-cell>
          <table:table-cell table:style-name="ce11" table:formula="of:=CONCATENATE([$JSON.$A$1];[.$C255];[$JSON.$B$1];[.$E255];[$JSON.$C$1];[.F255];[$JSON.$D$1];[.$G255];[$JSON.$E$1];IF(ISNA([.$T255]);&quot;null&quot;;&quot;&quot;&quot;&quot;&amp;[.$T255]&amp;&quot;&quot;&quot;&quot;);[$JSON.$F$1];[.$V255];[$JSON.$G$1];IF(ISNA([.$X255]);&quot;null&quot;;&quot;&quot;&quot;&quot;&amp;[.$X255]&amp;&quot;&quot;&quot;&quot;);[$JSON.$H$1];[.$AA255];[$JSON.$I$1];[.$I255];[$JSON.$J$1];[.K255];[$JSON.$K$1];[.$M255];[$JSON.$L$1];[.$P255];[$JSON.$M$1];[.$O255];[$JSON.$N$1];[.$S255];[$JSON.$O$1];[.$U255];[$JSON.$P$1];IF(ISNA([.$W255]);&quot;null&quot;;[.$W255]);[$JSON.$Q$1];[.$Y255];[$JSON.$R$1];IF([.$Z255];&quot;true&quot;;&quot;false&quot;);[$JSON.$S$1];[.$A255];[$JSON.$T$1];[.$B255];[$JSON.$U$1])" office:value-type="string" office:string-value="{&quot;id&quot;:&quot;3-26&quot;,&quot;name&quot;:&quot;ニコライ・レザノフ&quot;,&quot;displayName&quot;:&quot;ニコライ・レザノフ&quot;,&quot;kana&quot;:&quot;にこらいれざのふ&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rarity&quot;:1,&quot;type&quot;:1,&quot;level&quot;:1,&quot;color&quot;:2,&quot;term&quot;:1,&quot;trait&quot;:0,&quot;power&quot;:1000,&quot;legacy&quot;:0,&quot;anyNumCopies&quot;:false,&quot;orderTable&quot;:254,&quot;orderDeck&quot;:11}," calcext:value-type="string">
            <text:p>{"id":"3-26","name":"ニコライ・レザノフ","displayName":"ニコライ・レザノフ","kana":"にこらいれざのふ","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rarity":1,"type":1,"level":1,"color":2,"term":1,"trait":0,"power":1000,"legacy":0,"anyNumCopies":false,"orderTable":254,"orderDeck":11},</text:p>
          </table:table-cell>
          <table:table-cell table:number-columns-repeated="16356"/>
        </table:table-row>
        <table:table-row table:style-name="ro2">
          <table:table-cell table:style-name="ce11" office:value-type="float" office:value="255" calcext:value-type="float">
            <text:p>255</text:p>
          </table:table-cell>
          <table:table-cell table:style-name="ce11" office:value-type="float" office:value="113" calcext:value-type="float">
            <text:p>113</text:p>
          </table:table-cell>
          <table:table-cell table:style-name="ce21" office:value-type="string" calcext:value-type="string">
            <text:p>3-27</text:p>
          </table:table-cell>
          <table:table-cell table:style-name="ce21" office:value-type="float" office:value="27" calcext:value-type="float">
            <text:p>27</text:p>
          </table:table-cell>
          <table:table-cell table:style-name="ce11" office:value-type="string" calcext:value-type="string">
            <text:p>小野小町</text:p>
          </table:table-cell>
          <table:table-cell table:style-name="ce11" table:formula="of:=[.E256]" office:value-type="string" office:string-value="小野小町" calcext:value-type="string">
            <text:p>小野小町</text:p>
          </table:table-cell>
          <table:table-cell table:style-name="ce11" office:value-type="string" calcext:value-type="string">
            <text:p>おののこまち</text:p>
          </table:table-cell>
          <table:table-cell table:style-name="ce11" office:value-type="string" calcext:value-type="string">
            <text:p>第３弾ブースターパック</text:p>
          </table:table-cell>
          <table:table-cell table:style-name="ce11" table:formula="of:=VLOOKUP([.H256];[$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56];[$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56];[$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6];[$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6];[$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256];[$特性番号.$A$1:$特性番号.$B$8];2;0);0)" office:value-type="float" office:value="0" calcext:value-type="float">
            <text:p>0</text:p>
          </table:table-cell>
          <table:table-cell table:style-name="ce11"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table:style-name="ce11" office:value-type="float" office:value="1000" calcext:value-type="float">
            <text:p>1000</text:p>
          </table:table-cell>
          <table:table-cell table:style-name="ce25" office:value-type="string" calcext:value-type="string">
            <text:p>木霊</text:p>
          </table:table-cell>
          <table:table-cell table:style-name="ce11" table:formula="of:=IFERROR(VLOOKUP([.$X256];[$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7.png</text:p>
          </table:table-cell>
          <table:table-cell table:style-name="ce11" table:formula="of:=CONCATENATE([$JSON.$A$1];[.$C256];[$JSON.$B$1];[.$E256];[$JSON.$C$1];[.F256];[$JSON.$D$1];[.$G256];[$JSON.$E$1];IF(ISNA([.$T256]);&quot;null&quot;;&quot;&quot;&quot;&quot;&amp;[.$T256]&amp;&quot;&quot;&quot;&quot;);[$JSON.$F$1];[.$V256];[$JSON.$G$1];IF(ISNA([.$X256]);&quot;null&quot;;&quot;&quot;&quot;&quot;&amp;[.$X256]&amp;&quot;&quot;&quot;&quot;);[$JSON.$H$1];[.$AA256];[$JSON.$I$1];[.$I256];[$JSON.$J$1];[.K256];[$JSON.$K$1];[.$M256];[$JSON.$L$1];[.$P256];[$JSON.$M$1];[.$O256];[$JSON.$N$1];[.$S256];[$JSON.$O$1];[.$U256];[$JSON.$P$1];IF(ISNA([.$W256]);&quot;null&quot;;[.$W256]);[$JSON.$Q$1];[.$Y256];[$JSON.$R$1];IF([.$Z256];&quot;true&quot;;&quot;false&quot;);[$JSON.$S$1];[.$A256];[$JSON.$T$1];[.$B256];[$JSON.$U$1])" office:value-type="string" office:string-value="{&quot;id&quot;:&quot;3-27&quot;,&quot;name&quot;:&quot;小野小町&quot;,&quot;displayName&quot;:&quot;小野小町&quot;,&quot;kana&quot;:&quot;おののこまち&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rarity&quot;:2,&quot;type&quot;:1,&quot;level&quot;:3,&quot;color&quot;:4,&quot;term&quot;:2,&quot;trait&quot;:0,&quot;power&quot;:1000,&quot;legacy&quot;:8,&quot;anyNumCopies&quot;:false,&quot;orderTable&quot;:255,&quot;orderDeck&quot;:113}," calcext:value-type="string">
            <text:p>{"id":"3-27","name":"小野小町","displayName":"小野小町","kana":"おののこまち","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rarity":2,"type":1,"level":3,"color":4,"term":2,"trait":0,"power":1000,"legacy":8,"anyNumCopies":false,"orderTable":255,"orderDeck":113},</text:p>
          </table:table-cell>
          <table:table-cell table:number-columns-repeated="16356"/>
        </table:table-row>
        <table:table-row table:style-name="ro2">
          <table:table-cell table:style-name="ce11" office:value-type="float" office:value="256" calcext:value-type="float">
            <text:p>256</text:p>
          </table:table-cell>
          <table:table-cell table:style-name="ce11" office:value-type="float" office:value="114" calcext:value-type="float">
            <text:p>114</text:p>
          </table:table-cell>
          <table:table-cell table:style-name="ce21" office:value-type="string" calcext:value-type="string">
            <text:p>3-28</text:p>
          </table:table-cell>
          <table:table-cell table:style-name="ce21" office:value-type="float" office:value="28" calcext:value-type="float">
            <text:p>28</text:p>
          </table:table-cell>
          <table:table-cell table:style-name="ce11" office:value-type="string" calcext:value-type="string">
            <text:p>松尾芭蕉</text:p>
          </table:table-cell>
          <table:table-cell table:style-name="ce11" table:formula="of:=[.E257]" office:value-type="string" office:string-value="松尾芭蕉" calcext:value-type="string">
            <text:p>松尾芭蕉</text:p>
          </table:table-cell>
          <table:table-cell table:style-name="ce11" office:value-type="string" calcext:value-type="string">
            <text:p>まつおばしょう</text:p>
          </table:table-cell>
          <table:table-cell table:style-name="ce11" office:value-type="string" calcext:value-type="string">
            <text:p>第３弾ブースターパック</text:p>
          </table:table-cell>
          <table:table-cell table:style-name="ce11" table:formula="of:=VLOOKUP([.H257];[$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5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7];[$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7];[$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7];[$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257];[$特性番号.$A$1:$特性番号.$B$8];2;0);0)" office:value-type="float" office:value="0" calcext:value-type="float">
            <text:p>0</text:p>
          </table:table-cell>
          <table:table-cell table:style-name="ce11" office:value-type="string" calcext:value-type="string">
            <text:p>スタンド¶執筆 - 緑のハイケイが戦場に置かれたとき、1ドローして、これを裏向きで魔力ゾーン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25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8.png</text:p>
          </table:table-cell>
          <table:table-cell table:style-name="ce11" table:formula="of:=CONCATENATE([$JSON.$A$1];[.$C257];[$JSON.$B$1];[.$E257];[$JSON.$C$1];[.F257];[$JSON.$D$1];[.$G257];[$JSON.$E$1];IF(ISNA([.$T257]);&quot;null&quot;;&quot;&quot;&quot;&quot;&amp;[.$T257]&amp;&quot;&quot;&quot;&quot;);[$JSON.$F$1];[.$V257];[$JSON.$G$1];IF(ISNA([.$X257]);&quot;null&quot;;&quot;&quot;&quot;&quot;&amp;[.$X257]&amp;&quot;&quot;&quot;&quot;);[$JSON.$H$1];[.$AA257];[$JSON.$I$1];[.$I257];[$JSON.$J$1];[.K257];[$JSON.$K$1];[.$M257];[$JSON.$L$1];[.$P257];[$JSON.$M$1];[.$O257];[$JSON.$N$1];[.$S257];[$JSON.$O$1];[.$U257];[$JSON.$P$1];IF(ISNA([.$W257]);&quot;null&quot;;[.$W257]);[$JSON.$Q$1];[.$Y257];[$JSON.$R$1];IF([.$Z257];&quot;true&quot;;&quot;false&quot;);[$JSON.$S$1];[.$A257];[$JSON.$T$1];[.$B257];[$JSON.$U$1])" office:value-type="string" office:string-value="{&quot;id&quot;:&quot;3-28&quot;,&quot;name&quot;:&quot;松尾芭蕉&quot;,&quot;displayName&quot;:&quot;松尾芭蕉&quot;,&quot;kana&quot;:&quot;まつおばしょう&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rarity&quot;:1,&quot;type&quot;:1,&quot;level&quot;:3,&quot;color&quot;:4,&quot;term&quot;:2,&quot;trait&quot;:0,&quot;power&quot;:1000,&quot;legacy&quot;:4,&quot;anyNumCopies&quot;:false,&quot;orderTable&quot;:256,&quot;orderDeck&quot;:114}," calcext:value-type="string">
            <text:p>{"id":"3-28","name":"松尾芭蕉","displayName":"松尾芭蕉","kana":"まつおばしょう","traitText":null,"ruleText":"スタンド¶執筆 - 緑のハイケイが戦場に置かれたとき、1ドローして、これを裏向きで魔力ゾーンに置く。","legacyText":"1ドローする","imageUrl":"https://one-draw.jp/ijinden/cardlist/003/card/03_028.png","expansion":35,"rarity":1,"type":1,"level":3,"color":4,"term":2,"trait":0,"power":1000,"legacy":4,"anyNumCopies":false,"orderTable":256,"orderDeck":114},</text:p>
          </table:table-cell>
          <table:table-cell table:number-columns-repeated="16356"/>
        </table:table-row>
        <table:table-row table:style-name="ro2">
          <table:table-cell table:style-name="ce11" office:value-type="float" office:value="257" calcext:value-type="float">
            <text:p>257</text:p>
          </table:table-cell>
          <table:table-cell table:style-name="ce11" office:value-type="float" office:value="161" calcext:value-type="float">
            <text:p>161</text:p>
          </table:table-cell>
          <table:table-cell table:style-name="ce21" office:value-type="string" calcext:value-type="string">
            <text:p>3-29</text:p>
          </table:table-cell>
          <table:table-cell table:style-name="ce21" office:value-type="float" office:value="29" calcext:value-type="float">
            <text:p>29</text:p>
          </table:table-cell>
          <table:table-cell table:style-name="ce11" office:value-type="string" calcext:value-type="string">
            <text:p>朱舜水</text:p>
          </table:table-cell>
          <table:table-cell table:style-name="ce11" table:formula="of:=[.E258]" office:value-type="string" office:string-value="朱舜水" calcext:value-type="string">
            <text:p>朱舜水</text:p>
          </table:table-cell>
          <table:table-cell table:style-name="ce11" office:value-type="string" calcext:value-type="string">
            <text:p>しゅしゅんすい</text:p>
          </table:table-cell>
          <table:table-cell table:style-name="ce11" office:value-type="string" calcext:value-type="string">
            <text:p>第３弾ブースターパック</text:p>
          </table:table-cell>
          <table:table-cell table:style-name="ce11" table:formula="of:=VLOOKUP([.H258];[$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5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8];[$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8];[$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5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58];[$特性番号.$A$1:$特性番号.$B$8];2;0);0)" office:value-type="float" office:value="0" calcext:value-type="float">
            <text:p>0</text:p>
          </table:table-cell>
          <table:table-cell table:style-name="ce11"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table:style-name="ce11" office:value-type="float" office:value="3000" calcext:value-type="float">
            <text:p>3000</text:p>
          </table:table-cell>
          <table:table-cell table:style-name="ce25" office:value-type="string" calcext:value-type="string">
            <text:p>木霊</text:p>
          </table:table-cell>
          <table:table-cell table:style-name="ce11" table:formula="of:=IFERROR(VLOOKUP([.$X258];[$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29.png</text:p>
          </table:table-cell>
          <table:table-cell table:style-name="ce11" table:formula="of:=CONCATENATE([$JSON.$A$1];[.$C258];[$JSON.$B$1];[.$E258];[$JSON.$C$1];[.F258];[$JSON.$D$1];[.$G258];[$JSON.$E$1];IF(ISNA([.$T258]);&quot;null&quot;;&quot;&quot;&quot;&quot;&amp;[.$T258]&amp;&quot;&quot;&quot;&quot;);[$JSON.$F$1];[.$V258];[$JSON.$G$1];IF(ISNA([.$X258]);&quot;null&quot;;&quot;&quot;&quot;&quot;&amp;[.$X258]&amp;&quot;&quot;&quot;&quot;);[$JSON.$H$1];[.$AA258];[$JSON.$I$1];[.$I258];[$JSON.$J$1];[.K258];[$JSON.$K$1];[.$M258];[$JSON.$L$1];[.$P258];[$JSON.$M$1];[.$O258];[$JSON.$N$1];[.$S258];[$JSON.$O$1];[.$U258];[$JSON.$P$1];IF(ISNA([.$W258]);&quot;null&quot;;[.$W258]);[$JSON.$Q$1];[.$Y258];[$JSON.$R$1];IF([.$Z258];&quot;true&quot;;&quot;false&quot;);[$JSON.$S$1];[.$A258];[$JSON.$T$1];[.$B258];[$JSON.$U$1])" office:value-type="string" office:string-value="{&quot;id&quot;:&quot;3-29&quot;,&quot;name&quot;:&quot;朱舜水&quot;,&quot;displayName&quot;:&quot;朱舜水&quot;,&quot;kana&quot;:&quot;しゅしゅんすい&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rarity&quot;:1,&quot;type&quot;:1,&quot;level&quot;:4,&quot;color&quot;:4,&quot;term&quot;:0,&quot;trait&quot;:0,&quot;power&quot;:3000,&quot;legacy&quot;:8,&quot;anyNumCopies&quot;:false,&quot;orderTable&quot;:257,&quot;orderDeck&quot;:161}," calcext:value-type="string">
            <text:p>{"id":"3-29","name":"朱舜水","displayName":"朱舜水","kana":"しゅしゅんすい","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rarity":1,"type":1,"level":4,"color":4,"term":0,"trait":0,"power":3000,"legacy":8,"anyNumCopies":false,"orderTable":257,"orderDeck":161},</text:p>
          </table:table-cell>
          <table:table-cell table:number-columns-repeated="16356"/>
        </table:table-row>
        <table:table-row table:style-name="ro2">
          <table:table-cell table:style-name="ce11" office:value-type="float" office:value="258" calcext:value-type="float">
            <text:p>258</text:p>
          </table:table-cell>
          <table:table-cell table:style-name="ce11" office:value-type="float" office:value="60" calcext:value-type="float">
            <text:p>60</text:p>
          </table:table-cell>
          <table:table-cell table:style-name="ce21" office:value-type="string" calcext:value-type="string">
            <text:p>3-30</text:p>
          </table:table-cell>
          <table:table-cell table:style-name="ce21" office:value-type="float" office:value="30" calcext:value-type="float">
            <text:p>30</text:p>
          </table:table-cell>
          <table:table-cell table:style-name="ce11" office:value-type="string" calcext:value-type="string">
            <text:p>井原西鶴</text:p>
          </table:table-cell>
          <table:table-cell table:style-name="ce11" table:formula="of:=[.E259]" office:value-type="string" office:string-value="井原西鶴" calcext:value-type="string">
            <text:p>井原西鶴</text:p>
          </table:table-cell>
          <table:table-cell table:style-name="ce11" office:value-type="string" calcext:value-type="string">
            <text:p>いはらさいかく</text:p>
          </table:table-cell>
          <table:table-cell table:style-name="ce11" office:value-type="string" calcext:value-type="string">
            <text:p>第３弾ブースターパック</text:p>
          </table:table-cell>
          <table:table-cell table:style-name="ce11" table:formula="of:=VLOOKUP([.H259];[$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5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59];[$種類番号.$A$1:$種類番号.$B$4];2;0)" office:value-type="float" office:value="1" calcext:value-type="float">
            <text:p>1</text:p>
          </table:table-cell>
          <table:table-cell table:style-name="ce11" office:value-type="string" calcext:value-type="string">
            <text:p>緑</text:p>
          </table:table-cell>
          <table:table-cell table:style-name="ce11" table:formula="of:=VLOOKUP([.N259];[$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59];[$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259];[$特性番号.$A$1:$特性番号.$B$8];2;0);0)" office:value-type="float" office:value="0" calcext:value-type="float">
            <text:p>0</text:p>
          </table:table-cell>
          <table:table-cell table:style-name="ce11" office:value-type="string" calcext:value-type="string">
            <text:p>執筆 - ハイケイか「美術」イジンが戦場に置かれたとき、これを寝かせて発動できる。自分の山札の上から1枚を裏のまま魔力ゾーン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5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0.png</text:p>
          </table:table-cell>
          <table:table-cell table:style-name="ce11" table:formula="of:=CONCATENATE([$JSON.$A$1];[.$C259];[$JSON.$B$1];[.$E259];[$JSON.$C$1];[.F259];[$JSON.$D$1];[.$G259];[$JSON.$E$1];IF(ISNA([.$T259]);&quot;null&quot;;&quot;&quot;&quot;&quot;&amp;[.$T259]&amp;&quot;&quot;&quot;&quot;);[$JSON.$F$1];[.$V259];[$JSON.$G$1];IF(ISNA([.$X259]);&quot;null&quot;;&quot;&quot;&quot;&quot;&amp;[.$X259]&amp;&quot;&quot;&quot;&quot;);[$JSON.$H$1];[.$AA259];[$JSON.$I$1];[.$I259];[$JSON.$J$1];[.K259];[$JSON.$K$1];[.$M259];[$JSON.$L$1];[.$P259];[$JSON.$M$1];[.$O259];[$JSON.$N$1];[.$S259];[$JSON.$O$1];[.$U259];[$JSON.$P$1];IF(ISNA([.$W259]);&quot;null&quot;;[.$W259]);[$JSON.$Q$1];[.$Y259];[$JSON.$R$1];IF([.$Z259];&quot;true&quot;;&quot;false&quot;);[$JSON.$S$1];[.$A259];[$JSON.$T$1];[.$B259];[$JSON.$U$1])" office:value-type="string" office:string-value="{&quot;id&quot;:&quot;3-30&quot;,&quot;name&quot;:&quot;井原西鶴&quot;,&quot;displayName&quot;:&quot;井原西鶴&quot;,&quot;kana&quot;:&quot;いはらさいかく&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rarity&quot;:1,&quot;type&quot;:1,&quot;level&quot;:2,&quot;color&quot;:4,&quot;term&quot;:2,&quot;trait&quot;:0,&quot;power&quot;:1000,&quot;legacy&quot;:0,&quot;anyNumCopies&quot;:false,&quot;orderTable&quot;:258,&quot;orderDeck&quot;:60}," calcext:value-type="string">
            <text:p>{"id":"3-30","name":"井原西鶴","displayName":"井原西鶴","kana":"いはらさいかく","traitText":null,"ruleText":"執筆 - ハイケイか「美術」イジンが戦場に置かれたとき、これを寝かせて発動できる。自分の山札の上から1枚を裏のまま魔力ゾーンに置く。","legacyText":null,"imageUrl":"https://one-draw.jp/ijinden/cardlist/003/card/03_030.png","expansion":35,"rarity":1,"type":1,"level":2,"color":4,"term":2,"trait":0,"power":1000,"legacy":0,"anyNumCopies":false,"orderTable":258,"orderDeck":60},</text:p>
          </table:table-cell>
          <table:table-cell table:number-columns-repeated="16356"/>
        </table:table-row>
        <table:table-row table:style-name="ro2">
          <table:table-cell table:style-name="ce11" office:value-type="float" office:value="259" calcext:value-type="float">
            <text:p>259</text:p>
          </table:table-cell>
          <table:table-cell table:style-name="ce11" office:value-type="float" office:value="292" calcext:value-type="float">
            <text:p>292</text:p>
          </table:table-cell>
          <table:table-cell table:style-name="ce21" office:value-type="string" calcext:value-type="string">
            <text:p>3-31</text:p>
          </table:table-cell>
          <table:table-cell table:style-name="ce21" office:value-type="float" office:value="31" calcext:value-type="float">
            <text:p>31</text:p>
          </table:table-cell>
          <table:table-cell table:style-name="ce11" office:value-type="string" calcext:value-type="string">
            <text:p>近松門左衛門</text:p>
          </table:table-cell>
          <table:table-cell table:style-name="ce11" table:formula="of:=[.E260]" office:value-type="string" office:string-value="近松門左衛門" calcext:value-type="string">
            <text:p>近松門左衛門</text:p>
          </table:table-cell>
          <table:table-cell table:style-name="ce11" office:value-type="string" calcext:value-type="string">
            <text:p>ちかまつもんざえもん</text:p>
          </table:table-cell>
          <table:table-cell table:style-name="ce11" office:value-type="string" calcext:value-type="string">
            <text:p>第３弾ブースターパック</text:p>
          </table:table-cell>
          <table:table-cell table:style-name="ce11" table:formula="of:=VLOOKUP([.H260];[$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60];[$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60];[$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0];[$色番号.$A$1:$色番号.$B$10];2;0)" office:value-type="float" office:value="4" calcext:value-type="float">
            <text:p>4</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60];[$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260];[$特性番号.$A$1:$特性番号.$B$8];2;0);0)" office:value-type="float" office:value="0" calcext:value-type="float">
            <text:p>0</text:p>
          </table:table-cell>
          <table:table-cell table:style-name="ce11"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table:style-name="ce11"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26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1.png</text:p>
          </table:table-cell>
          <table:table-cell table:style-name="ce11" table:formula="of:=CONCATENATE([$JSON.$A$1];[.$C260];[$JSON.$B$1];[.$E260];[$JSON.$C$1];[.F260];[$JSON.$D$1];[.$G260];[$JSON.$E$1];IF(ISNA([.$T260]);&quot;null&quot;;&quot;&quot;&quot;&quot;&amp;[.$T260]&amp;&quot;&quot;&quot;&quot;);[$JSON.$F$1];[.$V260];[$JSON.$G$1];IF(ISNA([.$X260]);&quot;null&quot;;&quot;&quot;&quot;&quot;&amp;[.$X260]&amp;&quot;&quot;&quot;&quot;);[$JSON.$H$1];[.$AA260];[$JSON.$I$1];[.$I260];[$JSON.$J$1];[.K260];[$JSON.$K$1];[.$M260];[$JSON.$L$1];[.$P260];[$JSON.$M$1];[.$O260];[$JSON.$N$1];[.$S260];[$JSON.$O$1];[.$U260];[$JSON.$P$1];IF(ISNA([.$W260]);&quot;null&quot;;[.$W260]);[$JSON.$Q$1];[.$Y260];[$JSON.$R$1];IF([.$Z260];&quot;true&quot;;&quot;false&quot;);[$JSON.$S$1];[.$A260];[$JSON.$T$1];[.$B260];[$JSON.$U$1])" office:value-type="string" office:string-value="{&quot;id&quot;:&quot;3-31&quot;,&quot;name&quot;:&quot;近松門左衛門&quot;,&quot;displayName&quot;:&quot;近松門左衛門&quot;,&quot;kana&quot;:&quot;ちかまつもんざえもん&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rarity&quot;:2,&quot;type&quot;:1,&quot;level&quot;:9,&quot;color&quot;:4,&quot;term&quot;:2,&quot;trait&quot;:0,&quot;power&quot;:7000,&quot;legacy&quot;:0,&quot;anyNumCopies&quot;:false,&quot;orderTable&quot;:259,&quot;orderDeck&quot;:292}," calcext:value-type="string">
            <text:p>{"id":"3-31","name":"近松門左衛門","displayName":"近松門左衛門","kana":"ちかまつもんざえもん","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rarity":2,"type":1,"level":9,"color":4,"term":2,"trait":0,"power":7000,"legacy":0,"anyNumCopies":false,"orderTable":259,"orderDeck":292},</text:p>
          </table:table-cell>
          <table:table-cell table:number-columns-repeated="16356"/>
        </table:table-row>
        <table:table-row table:style-name="ro2">
          <table:table-cell table:style-name="ce11" office:value-type="float" office:value="260" calcext:value-type="float">
            <text:p>260</text:p>
          </table:table-cell>
          <table:table-cell table:style-name="ce11" office:value-type="float" office:value="17" calcext:value-type="float">
            <text:p>17</text:p>
          </table:table-cell>
          <table:table-cell table:style-name="ce21" office:value-type="string" calcext:value-type="string">
            <text:p>3-32</text:p>
          </table:table-cell>
          <table:table-cell table:style-name="ce21" office:value-type="float" office:value="32" calcext:value-type="float">
            <text:p>32</text:p>
          </table:table-cell>
          <table:table-cell table:style-name="ce11" office:value-type="string" calcext:value-type="string">
            <text:p>田沼意次</text:p>
          </table:table-cell>
          <table:table-cell table:style-name="ce11" table:formula="of:=[.E261]" office:value-type="string" office:string-value="田沼意次" calcext:value-type="string">
            <text:p>田沼意次</text:p>
          </table:table-cell>
          <table:table-cell table:style-name="ce11" office:value-type="string" calcext:value-type="string">
            <text:p>たぬまおきつぐ</text:p>
          </table:table-cell>
          <table:table-cell table:style-name="ce11" office:value-type="string" calcext:value-type="string">
            <text:p>第３弾ブースターパック</text:p>
          </table:table-cell>
          <table:table-cell table:style-name="ce11" table:formula="of:=VLOOKUP([.H261];[$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6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1];[$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1];[$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61];[$特性番号.$A$1:$特性番号.$B$8];2;0);0)" office:value-type="float" office:value="0" calcext:value-type="float">
            <text:p>0</text:p>
          </table:table-cell>
          <table:table-cell table:style-name="ce11" office:value-type="string" calcext:value-type="string">
            <text:p>パワー3000以上の間「自分のメインフェイズが開始したとき、マリョク配置権+1する」を得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6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2.png</text:p>
          </table:table-cell>
          <table:table-cell table:style-name="ce11" table:formula="of:=CONCATENATE([$JSON.$A$1];[.$C261];[$JSON.$B$1];[.$E261];[$JSON.$C$1];[.F261];[$JSON.$D$1];[.$G261];[$JSON.$E$1];IF(ISNA([.$T261]);&quot;null&quot;;&quot;&quot;&quot;&quot;&amp;[.$T261]&amp;&quot;&quot;&quot;&quot;);[$JSON.$F$1];[.$V261];[$JSON.$G$1];IF(ISNA([.$X261]);&quot;null&quot;;&quot;&quot;&quot;&quot;&amp;[.$X261]&amp;&quot;&quot;&quot;&quot;);[$JSON.$H$1];[.$AA261];[$JSON.$I$1];[.$I261];[$JSON.$J$1];[.K261];[$JSON.$K$1];[.$M261];[$JSON.$L$1];[.$P261];[$JSON.$M$1];[.$O261];[$JSON.$N$1];[.$S261];[$JSON.$O$1];[.$U261];[$JSON.$P$1];IF(ISNA([.$W261]);&quot;null&quot;;[.$W261]);[$JSON.$Q$1];[.$Y261];[$JSON.$R$1];IF([.$Z261];&quot;true&quot;;&quot;false&quot;);[$JSON.$S$1];[.$A261];[$JSON.$T$1];[.$B261];[$JSON.$U$1])" office:value-type="string" office:string-value="{&quot;id&quot;:&quot;3-32&quot;,&quot;name&quot;:&quot;田沼意次&quot;,&quot;displayName&quot;:&quot;田沼意次&quot;,&quot;kana&quot;:&quot;たぬまおきつぐ&quot;,&quot;traitText&quot;:null,&quot;ruleText&quot;:&quot;パワー3000以上の間「自分のメインフェイズが開始したとき、マリョク配置権+1する」を得る。&quot;,&quot;legacyText&quot;:null,&quot;imageUrl&quot;:&quot;https://one-draw.jp/ijinden/cardlist/003/card/03_032.png&quot;,&quot;expansion&quot;:35,&quot;rarity&quot;:1,&quot;type&quot;:1,&quot;level&quot;:1,&quot;color&quot;:4,&quot;term&quot;:0,&quot;trait&quot;:0,&quot;power&quot;:1000,&quot;legacy&quot;:0,&quot;anyNumCopies&quot;:false,&quot;orderTable&quot;:260,&quot;orderDeck&quot;:17}," calcext:value-type="string">
            <text:p>{"id":"3-32","name":"田沼意次","displayName":"田沼意次","kana":"たぬまおきつぐ","traitText":null,"ruleText":"パワー3000以上の間「自分のメインフェイズが開始したとき、マリョク配置権+1する」を得る。","legacyText":null,"imageUrl":"https://one-draw.jp/ijinden/cardlist/003/card/03_032.png","expansion":35,"rarity":1,"type":1,"level":1,"color":4,"term":0,"trait":0,"power":1000,"legacy":0,"anyNumCopies":false,"orderTable":260,"orderDeck":17},</text:p>
          </table:table-cell>
          <table:table-cell table:number-columns-repeated="16356"/>
        </table:table-row>
        <table:table-row table:style-name="ro2">
          <table:table-cell table:style-name="ce11" office:value-type="float" office:value="261" calcext:value-type="float">
            <text:p>261</text:p>
          </table:table-cell>
          <table:table-cell table:style-name="ce11" office:value-type="float" office:value="61" calcext:value-type="float">
            <text:p>61</text:p>
          </table:table-cell>
          <table:table-cell table:style-name="ce21" office:value-type="string" calcext:value-type="string">
            <text:p>3-33</text:p>
          </table:table-cell>
          <table:table-cell table:style-name="ce21" office:value-type="float" office:value="33" calcext:value-type="float">
            <text:p>33</text:p>
          </table:table-cell>
          <table:table-cell table:style-name="ce11" office:value-type="string" calcext:value-type="string">
            <text:p>高野長英</text:p>
          </table:table-cell>
          <table:table-cell table:style-name="ce11" table:formula="of:=[.E262]" office:value-type="string" office:string-value="高野長英" calcext:value-type="string">
            <text:p>高野長英</text:p>
          </table:table-cell>
          <table:table-cell table:style-name="ce11" office:value-type="string" calcext:value-type="string">
            <text:p>たかのちょうえい</text:p>
          </table:table-cell>
          <table:table-cell table:style-name="ce11" office:value-type="string" calcext:value-type="string">
            <text:p>第３弾ブースターパック</text:p>
          </table:table-cell>
          <table:table-cell table:style-name="ce11" table:formula="of:=VLOOKUP([.H262];[$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6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2];[$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2];[$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2];[$能力語番号.$A$1:$能力語番号.$B$11];2;0);0)" office:value-type="float" office:value="0" calcext:value-type="float">
            <text:p>0</text:p>
          </table:table-cell>
          <table:table-cell office:value-type="string" calcext:value-type="string">
            <text:p>医術</text:p>
          </table:table-cell>
          <table:table-cell table:style-name="ce11" table:formula="of:=IFERROR(VLOOKUP([.$T262];[$特性番号.$A$1:$特性番号.$B$8];2;0);0)" office:value-type="float" office:value="16" calcext:value-type="float">
            <text:p>16</text:p>
          </table:table-cell>
          <table:table-cell table:style-name="ce11" office:value-type="string" calcext:value-type="string">
            <text:p>相手のターンのブロックステップが開始したとき、自分の魔力ゾーンのカード1つを墓地に置いて発動できる。自分の戦場のカードすべてを起こす。</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26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3.png</text:p>
          </table:table-cell>
          <table:table-cell table:style-name="ce11" table:formula="of:=CONCATENATE([$JSON.$A$1];[.$C262];[$JSON.$B$1];[.$E262];[$JSON.$C$1];[.F262];[$JSON.$D$1];[.$G262];[$JSON.$E$1];IF(ISNA([.$T262]);&quot;null&quot;;&quot;&quot;&quot;&quot;&amp;[.$T262]&amp;&quot;&quot;&quot;&quot;);[$JSON.$F$1];[.$V262];[$JSON.$G$1];IF(ISNA([.$X262]);&quot;null&quot;;&quot;&quot;&quot;&quot;&amp;[.$X262]&amp;&quot;&quot;&quot;&quot;);[$JSON.$H$1];[.$AA262];[$JSON.$I$1];[.$I262];[$JSON.$J$1];[.K262];[$JSON.$K$1];[.$M262];[$JSON.$L$1];[.$P262];[$JSON.$M$1];[.$O262];[$JSON.$N$1];[.$S262];[$JSON.$O$1];[.$U262];[$JSON.$P$1];IF(ISNA([.$W262]);&quot;null&quot;;[.$W262]);[$JSON.$Q$1];[.$Y262];[$JSON.$R$1];IF([.$Z262];&quot;true&quot;;&quot;false&quot;);[$JSON.$S$1];[.$A262];[$JSON.$T$1];[.$B262];[$JSON.$U$1])" office:value-type="string" office:string-value="{&quot;id&quot;:&quot;3-33&quot;,&quot;name&quot;:&quot;高野長英&quot;,&quot;displayName&quot;:&quot;高野長英&quot;,&quot;kana&quot;:&quot;たかのちょうえい&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rarity&quot;:1,&quot;type&quot;:1,&quot;level&quot;:2,&quot;color&quot;:4,&quot;term&quot;:0,&quot;trait&quot;:16,&quot;power&quot;:2000,&quot;legacy&quot;:4,&quot;anyNumCopies&quot;:false,&quot;orderTable&quot;:261,&quot;orderDeck&quot;:61}," calcext:value-type="string">
            <text:p>{"id":"3-33","name":"高野長英","displayName":"高野長英","kana":"たかのちょうえい","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rarity":1,"type":1,"level":2,"color":4,"term":0,"trait":16,"power":2000,"legacy":4,"anyNumCopies":false,"orderTable":261,"orderDeck":61},</text:p>
          </table:table-cell>
          <table:table-cell table:number-columns-repeated="16356"/>
        </table:table-row>
        <table:table-row table:style-name="ro2">
          <table:table-cell table:style-name="ce11" office:value-type="float" office:value="262" calcext:value-type="float">
            <text:p>262</text:p>
          </table:table-cell>
          <table:table-cell table:style-name="ce11" office:value-type="float" office:value="246" calcext:value-type="float">
            <text:p>246</text:p>
          </table:table-cell>
          <table:table-cell table:style-name="ce21" office:value-type="string" calcext:value-type="string">
            <text:p>3-34</text:p>
          </table:table-cell>
          <table:table-cell table:style-name="ce21" office:value-type="float" office:value="34" calcext:value-type="float">
            <text:p>34</text:p>
          </table:table-cell>
          <table:table-cell table:style-name="ce11" office:value-type="string" calcext:value-type="string">
            <text:p>菱川師宣</text:p>
          </table:table-cell>
          <table:table-cell table:style-name="ce11" table:formula="of:=[.E263]" office:value-type="string" office:string-value="菱川師宣" calcext:value-type="string">
            <text:p>菱川師宣</text:p>
          </table:table-cell>
          <table:table-cell table:style-name="ce11" office:value-type="string" calcext:value-type="string">
            <text:p>ひしかわもろのぶ</text:p>
          </table:table-cell>
          <table:table-cell table:style-name="ce11" office:value-type="string" calcext:value-type="string">
            <text:p>第３弾ブースターパック</text:p>
          </table:table-cell>
          <table:table-cell table:style-name="ce11" table:formula="of:=VLOOKUP([.H263];[$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6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3];[$種類番号.$A$1:$種類番号.$B$4];2;0)" office:value-type="float" office:value="1" calcext:value-type="float">
            <text:p>1</text:p>
          </table:table-cell>
          <table:table-cell table:style-name="ce11" office:value-type="string" calcext:value-type="string">
            <text:p>緑</text:p>
          </table:table-cell>
          <table:table-cell table:style-name="ce11" table:formula="of:=VLOOKUP([.N263];[$色番号.$A$1:$色番号.$B$10];2;0)" office:value-type="float" office:value="4" calcext:value-type="float">
            <text:p>4</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3];[$能力語番号.$A$1:$能力語番号.$B$11];2;0);0)" office:value-type="float" office:value="0" calcext:value-type="float">
            <text:p>0</text:p>
          </table:table-cell>
          <table:table-cell office:value-type="string" calcext:value-type="string">
            <text:p>美術</text:p>
          </table:table-cell>
          <table:table-cell table:style-name="ce11" table:formula="of:=IFERROR(VLOOKUP([.$T263];[$特性番号.$A$1:$特性番号.$B$8];2;0);0)" office:value-type="float" office:value="2" calcext:value-type="float">
            <text:p>2</text:p>
          </table:table-cell>
          <table:table-cell table:style-name="ce11" office:value-type="string" calcext:value-type="string">
            <text:p>「執筆」を持つイジンが自分の戦場に置かれたとき、これを寝かせて発動できる。イジン召喚権+1する。</text:p>
          </table:table-cell>
          <table:table-cell table:style-name="ce11" office:value-type="float" office:value="5000" calcext:value-type="float">
            <text:p>5000</text:p>
          </table:table-cell>
          <table:table-cell table:style-name="ce25" office:value-type="string" calcext:value-type="string">
            <text:p>魔力化</text:p>
          </table:table-cell>
          <table:table-cell table:style-name="ce11" table:formula="of:=IFERROR(VLOOKUP([.$X26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4.png</text:p>
          </table:table-cell>
          <table:table-cell table:style-name="ce11" table:formula="of:=CONCATENATE([$JSON.$A$1];[.$C263];[$JSON.$B$1];[.$E263];[$JSON.$C$1];[.F263];[$JSON.$D$1];[.$G263];[$JSON.$E$1];IF(ISNA([.$T263]);&quot;null&quot;;&quot;&quot;&quot;&quot;&amp;[.$T263]&amp;&quot;&quot;&quot;&quot;);[$JSON.$F$1];[.$V263];[$JSON.$G$1];IF(ISNA([.$X263]);&quot;null&quot;;&quot;&quot;&quot;&quot;&amp;[.$X263]&amp;&quot;&quot;&quot;&quot;);[$JSON.$H$1];[.$AA263];[$JSON.$I$1];[.$I263];[$JSON.$J$1];[.K263];[$JSON.$K$1];[.$M263];[$JSON.$L$1];[.$P263];[$JSON.$M$1];[.$O263];[$JSON.$N$1];[.$S263];[$JSON.$O$1];[.$U263];[$JSON.$P$1];IF(ISNA([.$W263]);&quot;null&quot;;[.$W263]);[$JSON.$Q$1];[.$Y263];[$JSON.$R$1];IF([.$Z263];&quot;true&quot;;&quot;false&quot;);[$JSON.$S$1];[.$A263];[$JSON.$T$1];[.$B263];[$JSON.$U$1])" office:value-type="string" office:string-value="{&quot;id&quot;:&quot;3-34&quot;,&quot;name&quot;:&quot;菱川師宣&quot;,&quot;displayName&quot;:&quot;菱川師宣&quot;,&quot;kana&quot;:&quot;ひしかわもろのぶ&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rarity&quot;:1,&quot;type&quot;:1,&quot;level&quot;:6,&quot;color&quot;:4,&quot;term&quot;:0,&quot;trait&quot;:2,&quot;power&quot;:5000,&quot;legacy&quot;:1,&quot;anyNumCopies&quot;:false,&quot;orderTable&quot;:262,&quot;orderDeck&quot;:246}," calcext:value-type="string">
            <text:p>{"id":"3-34","name":"菱川師宣","displayName":"菱川師宣","kana":"ひしかわもろのぶ","traitText":"美術","ruleText":"「執筆」を持つイジンが自分の戦場に置かれたとき、これを寝かせて発動できる。イジン召喚権+1する。","legacyText":"魔力化","imageUrl":"https://one-draw.jp/ijinden/cardlist/003/card/03_034.png","expansion":35,"rarity":1,"type":1,"level":6,"color":4,"term":0,"trait":2,"power":5000,"legacy":1,"anyNumCopies":false,"orderTable":262,"orderDeck":246},</text:p>
          </table:table-cell>
          <table:table-cell table:number-columns-repeated="16356"/>
        </table:table-row>
        <table:table-row table:style-name="ro2">
          <table:table-cell table:style-name="ce11" office:value-type="float" office:value="263" calcext:value-type="float">
            <text:p>263</text:p>
          </table:table-cell>
          <table:table-cell table:style-name="ce11" office:value-type="float" office:value="218" calcext:value-type="float">
            <text:p>218</text:p>
          </table:table-cell>
          <table:table-cell table:style-name="ce21" office:value-type="string" calcext:value-type="string">
            <text:p>3-35</text:p>
          </table:table-cell>
          <table:table-cell table:style-name="ce21" office:value-type="float" office:value="35" calcext:value-type="float">
            <text:p>35</text:p>
          </table:table-cell>
          <table:table-cell table:style-name="ce11" office:value-type="string" calcext:value-type="string">
            <text:p>徳川吉宗</text:p>
          </table:table-cell>
          <table:table-cell table:style-name="ce11" table:formula="of:=[.E264]" office:value-type="string" office:string-value="徳川吉宗" calcext:value-type="string">
            <text:p>徳川吉宗</text:p>
          </table:table-cell>
          <table:table-cell table:style-name="ce11" office:value-type="string" calcext:value-type="string">
            <text:p>とくがわよしむね</text:p>
          </table:table-cell>
          <table:table-cell table:style-name="ce11" office:value-type="string" calcext:value-type="string">
            <text:p>第３弾ブースターパック</text:p>
          </table:table-cell>
          <table:table-cell table:style-name="ce11" table:formula="of:=VLOOKUP([.H264];[$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6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64];[$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4];[$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64];[$特性番号.$A$1:$特性番号.$B$8];2;0);0)" office:value-type="float" office:value="0" calcext:value-type="float">
            <text:p>0</text:p>
          </table:table-cell>
          <table:table-cell table:style-name="ce11"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table:style-name="ce11" office:value-type="float" office:value="1000" calcext:value-type="float">
            <text:p>1000</text:p>
          </table:table-cell>
          <table:table-cell table:style-name="ce25" office:value-type="string" calcext:value-type="string">
            <text:p>反魂</text:p>
          </table:table-cell>
          <table:table-cell table:style-name="ce11" table:formula="of:=IFERROR(VLOOKUP([.$X264];[$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5.png</text:p>
          </table:table-cell>
          <table:table-cell table:style-name="ce11" table:formula="of:=CONCATENATE([$JSON.$A$1];[.$C264];[$JSON.$B$1];[.$E264];[$JSON.$C$1];[.F264];[$JSON.$D$1];[.$G264];[$JSON.$E$1];IF(ISNA([.$T264]);&quot;null&quot;;&quot;&quot;&quot;&quot;&amp;[.$T264]&amp;&quot;&quot;&quot;&quot;);[$JSON.$F$1];[.$V264];[$JSON.$G$1];IF(ISNA([.$X264]);&quot;null&quot;;&quot;&quot;&quot;&quot;&amp;[.$X264]&amp;&quot;&quot;&quot;&quot;);[$JSON.$H$1];[.$AA264];[$JSON.$I$1];[.$I264];[$JSON.$J$1];[.K264];[$JSON.$K$1];[.$M264];[$JSON.$L$1];[.$P264];[$JSON.$M$1];[.$O264];[$JSON.$N$1];[.$S264];[$JSON.$O$1];[.$U264];[$JSON.$P$1];IF(ISNA([.$W264]);&quot;null&quot;;[.$W264]);[$JSON.$Q$1];[.$Y264];[$JSON.$R$1];IF([.$Z264];&quot;true&quot;;&quot;false&quot;);[$JSON.$S$1];[.$A264];[$JSON.$T$1];[.$B264];[$JSON.$U$1])" office:value-type="string" office:string-value="{&quot;id&quot;:&quot;3-35&quot;,&quot;name&quot;:&quot;徳川吉宗&quot;,&quot;displayName&quot;:&quot;徳川吉宗&quot;,&quot;kana&quot;:&quot;とくがわよしむね&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rarity&quot;:2,&quot;type&quot;:1,&quot;level&quot;:5,&quot;color&quot;:8,&quot;term&quot;:0,&quot;trait&quot;:0,&quot;power&quot;:1000,&quot;legacy&quot;:6,&quot;anyNumCopies&quot;:false,&quot;orderTable&quot;:263,&quot;orderDeck&quot;:218}," calcext:value-type="string">
            <text:p>{"id":"3-35","name":"徳川吉宗","displayName":"徳川吉宗","kana":"とくがわよしむね","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rarity":2,"type":1,"level":5,"color":8,"term":0,"trait":0,"power":1000,"legacy":6,"anyNumCopies":false,"orderTable":263,"orderDeck":218},</text:p>
          </table:table-cell>
          <table:table-cell table:number-columns-repeated="16356"/>
        </table:table-row>
        <table:table-row table:style-name="ro2">
          <table:table-cell table:style-name="ce11" office:value-type="float" office:value="264" calcext:value-type="float">
            <text:p>264</text:p>
          </table:table-cell>
          <table:table-cell table:style-name="ce11" office:value-type="float" office:value="23" calcext:value-type="float">
            <text:p>23</text:p>
          </table:table-cell>
          <table:table-cell table:style-name="ce21" office:value-type="string" calcext:value-type="string">
            <text:p>3-36</text:p>
          </table:table-cell>
          <table:table-cell table:style-name="ce21" office:value-type="float" office:value="36" calcext:value-type="float">
            <text:p>36</text:p>
          </table:table-cell>
          <table:table-cell table:style-name="ce11" office:value-type="string" calcext:value-type="string">
            <text:p>雪舟</text:p>
          </table:table-cell>
          <table:table-cell table:style-name="ce11" table:formula="of:=[.E265]" office:value-type="string" office:string-value="雪舟" calcext:value-type="string">
            <text:p>雪舟</text:p>
          </table:table-cell>
          <table:table-cell table:style-name="ce11" office:value-type="string" calcext:value-type="string">
            <text:p>せっしゅう</text:p>
          </table:table-cell>
          <table:table-cell table:style-name="ce11" office:value-type="string" calcext:value-type="string">
            <text:p>第３弾ブースターパック</text:p>
          </table:table-cell>
          <table:table-cell table:style-name="ce11" table:formula="of:=VLOOKUP([.H265];[$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6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5];[$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5];[$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5];[$能力語番号.$A$1:$能力語番号.$B$11];2;0);0)" office:value-type="float" office:value="0" calcext:value-type="float">
            <text:p>0</text:p>
          </table:table-cell>
          <table:table-cell office:value-type="string" calcext:value-type="string">
            <text:p>美術</text:p>
          </table:table-cell>
          <table:table-cell table:style-name="ce11" table:formula="of:=IFERROR(VLOOKUP([.$T265];[$特性番号.$A$1:$特性番号.$B$8];2;0);0)" office:value-type="float" office:value="2" calcext:value-type="float">
            <text:p>2</text:p>
          </table:table-cell>
          <table:table-cell table:style-name="ce11" office:value-type="string" calcext:value-type="string">
            <text:p>戦場に置かれたとき、自分の手札1枚を山札の下に戻して、1ドローする。</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26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6.png</text:p>
          </table:table-cell>
          <table:table-cell table:style-name="ce11" table:formula="of:=CONCATENATE([$JSON.$A$1];[.$C265];[$JSON.$B$1];[.$E265];[$JSON.$C$1];[.F265];[$JSON.$D$1];[.$G265];[$JSON.$E$1];IF(ISNA([.$T265]);&quot;null&quot;;&quot;&quot;&quot;&quot;&amp;[.$T265]&amp;&quot;&quot;&quot;&quot;);[$JSON.$F$1];[.$V265];[$JSON.$G$1];IF(ISNA([.$X265]);&quot;null&quot;;&quot;&quot;&quot;&quot;&amp;[.$X265]&amp;&quot;&quot;&quot;&quot;);[$JSON.$H$1];[.$AA265];[$JSON.$I$1];[.$I265];[$JSON.$J$1];[.K265];[$JSON.$K$1];[.$M265];[$JSON.$L$1];[.$P265];[$JSON.$M$1];[.$O265];[$JSON.$N$1];[.$S265];[$JSON.$O$1];[.$U265];[$JSON.$P$1];IF(ISNA([.$W265]);&quot;null&quot;;[.$W265]);[$JSON.$Q$1];[.$Y265];[$JSON.$R$1];IF([.$Z265];&quot;true&quot;;&quot;false&quot;);[$JSON.$S$1];[.$A265];[$JSON.$T$1];[.$B265];[$JSON.$U$1])" office:value-type="string" office:string-value="{&quot;id&quot;:&quot;3-36&quot;,&quot;name&quot;:&quot;雪舟&quot;,&quot;displayName&quot;:&quot;雪舟&quot;,&quot;kana&quot;:&quot;せっしゅう&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rarity&quot;:1,&quot;type&quot;:1,&quot;level&quot;:1,&quot;color&quot;:8,&quot;term&quot;:0,&quot;trait&quot;:2,&quot;power&quot;:500,&quot;legacy&quot;:4,&quot;anyNumCopies&quot;:false,&quot;orderTable&quot;:264,&quot;orderDeck&quot;:23}," calcext:value-type="string">
            <text:p>{"id":"3-36","name":"雪舟","displayName":"雪舟","kana":"せっしゅう","traitText":"美術","ruleText":"戦場に置かれたとき、自分の手札1枚を山札の下に戻して、1ドローする。","legacyText":"1ドローする","imageUrl":"https://one-draw.jp/ijinden/cardlist/003/card/03_036.png","expansion":35,"rarity":1,"type":1,"level":1,"color":8,"term":0,"trait":2,"power":500,"legacy":4,"anyNumCopies":false,"orderTable":264,"orderDeck":23},</text:p>
          </table:table-cell>
          <table:table-cell table:number-columns-repeated="16356"/>
        </table:table-row>
        <table:table-row table:style-name="ro2">
          <table:table-cell table:style-name="ce11" office:value-type="float" office:value="265" calcext:value-type="float">
            <text:p>265</text:p>
          </table:table-cell>
          <table:table-cell table:style-name="ce11" office:value-type="float" office:value="250" calcext:value-type="float">
            <text:p>250</text:p>
          </table:table-cell>
          <table:table-cell table:style-name="ce21" office:value-type="string" calcext:value-type="string">
            <text:p>3-37</text:p>
          </table:table-cell>
          <table:table-cell table:style-name="ce21" office:value-type="float" office:value="37" calcext:value-type="float">
            <text:p>37</text:p>
          </table:table-cell>
          <table:table-cell table:style-name="ce11" office:value-type="string" calcext:value-type="string">
            <text:p>俵屋宗達</text:p>
          </table:table-cell>
          <table:table-cell table:style-name="ce11" table:formula="of:=[.E266]" office:value-type="string" office:string-value="俵屋宗達" calcext:value-type="string">
            <text:p>俵屋宗達</text:p>
          </table:table-cell>
          <table:table-cell table:style-name="ce11" office:value-type="string" calcext:value-type="string">
            <text:p>たわらやそうたつ</text:p>
          </table:table-cell>
          <table:table-cell table:style-name="ce11" office:value-type="string" calcext:value-type="string">
            <text:p>第３弾ブースターパック</text:p>
          </table:table-cell>
          <table:table-cell table:style-name="ce11" table:formula="of:=VLOOKUP([.H266];[$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6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6];[$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6];[$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6];[$能力語番号.$A$1:$能力語番号.$B$11];2;0);0)" office:value-type="float" office:value="0" calcext:value-type="float">
            <text:p>0</text:p>
          </table:table-cell>
          <table:table-cell office:value-type="string" calcext:value-type="string">
            <text:p>美術</text:p>
          </table:table-cell>
          <table:table-cell table:style-name="ce11" table:formula="of:=IFERROR(VLOOKUP([.$T266];[$特性番号.$A$1:$特性番号.$B$8];2;0);0)" office:value-type="float" office:value="2" calcext:value-type="float">
            <text:p>2</text:p>
          </table:table-cell>
          <table:table-cell table:style-name="ce11"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table:style-name="ce11" office:value-type="float" office:value="5500" calcext:value-type="float">
            <text:p>5500</text:p>
          </table:table-cell>
          <table:table-cell table:style-name="ce25" table:formula="of:=NA()" office:value-type="string" office:string-value="" calcext:value-type="error">
            <text:p>#N/A</text:p>
          </table:table-cell>
          <table:table-cell table:style-name="ce11" table:formula="of:=IFERROR(VLOOKUP([.$X26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7.png</text:p>
          </table:table-cell>
          <table:table-cell table:style-name="ce11" table:formula="of:=CONCATENATE([$JSON.$A$1];[.$C266];[$JSON.$B$1];[.$E266];[$JSON.$C$1];[.F266];[$JSON.$D$1];[.$G266];[$JSON.$E$1];IF(ISNA([.$T266]);&quot;null&quot;;&quot;&quot;&quot;&quot;&amp;[.$T266]&amp;&quot;&quot;&quot;&quot;);[$JSON.$F$1];[.$V266];[$JSON.$G$1];IF(ISNA([.$X266]);&quot;null&quot;;&quot;&quot;&quot;&quot;&amp;[.$X266]&amp;&quot;&quot;&quot;&quot;);[$JSON.$H$1];[.$AA266];[$JSON.$I$1];[.$I266];[$JSON.$J$1];[.K266];[$JSON.$K$1];[.$M266];[$JSON.$L$1];[.$P266];[$JSON.$M$1];[.$O266];[$JSON.$N$1];[.$S266];[$JSON.$O$1];[.$U266];[$JSON.$P$1];IF(ISNA([.$W266]);&quot;null&quot;;[.$W266]);[$JSON.$Q$1];[.$Y266];[$JSON.$R$1];IF([.$Z266];&quot;true&quot;;&quot;false&quot;);[$JSON.$S$1];[.$A266];[$JSON.$T$1];[.$B266];[$JSON.$U$1])" office:value-type="string" office:string-value="{&quot;id&quot;:&quot;3-37&quot;,&quot;name&quot;:&quot;俵屋宗達&quot;,&quot;displayName&quot;:&quot;俵屋宗達&quot;,&quot;kana&quot;:&quot;たわらやそうたつ&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rarity&quot;:1,&quot;type&quot;:1,&quot;level&quot;:6,&quot;color&quot;:8,&quot;term&quot;:0,&quot;trait&quot;:2,&quot;power&quot;:5500,&quot;legacy&quot;:0,&quot;anyNumCopies&quot;:false,&quot;orderTable&quot;:265,&quot;orderDeck&quot;:250}," calcext:value-type="string">
            <text:p>{"id":"3-37","name":"俵屋宗達","displayName":"俵屋宗達","kana":"たわらやそうたつ","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rarity":1,"type":1,"level":6,"color":8,"term":0,"trait":2,"power":5500,"legacy":0,"anyNumCopies":false,"orderTable":265,"orderDeck":250},</text:p>
          </table:table-cell>
          <table:table-cell table:number-columns-repeated="16356"/>
        </table:table-row>
        <table:table-row table:style-name="ro2">
          <table:table-cell table:style-name="ce11" office:value-type="float" office:value="266" calcext:value-type="float">
            <text:p>266</text:p>
          </table:table-cell>
          <table:table-cell table:style-name="ce11" office:value-type="float" office:value="295" calcext:value-type="float">
            <text:p>295</text:p>
          </table:table-cell>
          <table:table-cell table:style-name="ce21" office:value-type="string" calcext:value-type="string">
            <text:p>3-38</text:p>
          </table:table-cell>
          <table:table-cell table:style-name="ce21" office:value-type="float" office:value="38" calcext:value-type="float">
            <text:p>38</text:p>
          </table:table-cell>
          <table:table-cell table:style-name="ce11" office:value-type="string" calcext:value-type="string">
            <text:p>司馬炎</text:p>
          </table:table-cell>
          <table:table-cell table:style-name="ce11" table:formula="of:=[.E267]" office:value-type="string" office:string-value="司馬炎" calcext:value-type="string">
            <text:p>司馬炎</text:p>
          </table:table-cell>
          <table:table-cell table:style-name="ce11" office:value-type="string" calcext:value-type="string">
            <text:p>しばえん</text:p>
          </table:table-cell>
          <table:table-cell table:style-name="ce11" office:value-type="string" calcext:value-type="string">
            <text:p>第３弾ブースターパック</text:p>
          </table:table-cell>
          <table:table-cell table:style-name="ce11" table:formula="of:=VLOOKUP([.H267];[$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6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7];[$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7];[$色番号.$A$1:$色番号.$B$10];2;0)" office:value-type="float" office:value="8" calcext:value-type="float">
            <text:p>8</text:p>
          </table:table-cell>
          <table:table-cell table:style-name="ce11"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67];[$特性番号.$A$1:$特性番号.$B$8];2;0);0)" office:value-type="float" office:value="0" calcext:value-type="float">
            <text:p>0</text:p>
          </table:table-cell>
          <table:table-cell table:style-name="ce11" office:value-type="string" calcext:value-type="string">
            <text:p>戦場に置かれたとき、自分の戦場のガーディアン1体につき、戦場のイジン1体を山札の下に戻す。</text:p>
          </table:table-cell>
          <table:table-cell table:style-name="ce11" office:value-type="float" office:value="3000" calcext:value-type="float">
            <text:p>3000</text:p>
          </table:table-cell>
          <table:table-cell table:style-name="ce25" office:value-type="string" calcext:value-type="string">
            <text:p>反魂</text:p>
          </table:table-cell>
          <table:table-cell table:style-name="ce11" table:formula="of:=IFERROR(VLOOKUP([.$X267];[$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8.png</text:p>
          </table:table-cell>
          <table:table-cell table:style-name="ce11" table:formula="of:=CONCATENATE([$JSON.$A$1];[.$C267];[$JSON.$B$1];[.$E267];[$JSON.$C$1];[.F267];[$JSON.$D$1];[.$G267];[$JSON.$E$1];IF(ISNA([.$T267]);&quot;null&quot;;&quot;&quot;&quot;&quot;&amp;[.$T267]&amp;&quot;&quot;&quot;&quot;);[$JSON.$F$1];[.$V267];[$JSON.$G$1];IF(ISNA([.$X267]);&quot;null&quot;;&quot;&quot;&quot;&quot;&amp;[.$X267]&amp;&quot;&quot;&quot;&quot;);[$JSON.$H$1];[.$AA267];[$JSON.$I$1];[.$I267];[$JSON.$J$1];[.K267];[$JSON.$K$1];[.$M267];[$JSON.$L$1];[.$P267];[$JSON.$M$1];[.$O267];[$JSON.$N$1];[.$S267];[$JSON.$O$1];[.$U267];[$JSON.$P$1];IF(ISNA([.$W267]);&quot;null&quot;;[.$W267]);[$JSON.$Q$1];[.$Y267];[$JSON.$R$1];IF([.$Z267];&quot;true&quot;;&quot;false&quot;);[$JSON.$S$1];[.$A267];[$JSON.$T$1];[.$B267];[$JSON.$U$1])" office:value-type="string" office:string-value="{&quot;id&quot;:&quot;3-38&quot;,&quot;name&quot;:&quot;司馬炎&quot;,&quot;displayName&quot;:&quot;司馬炎&quot;,&quot;kana&quot;:&quot;しばえん&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rarity&quot;:1,&quot;type&quot;:1,&quot;level&quot;:9,&quot;color&quot;:8,&quot;term&quot;:0,&quot;trait&quot;:0,&quot;power&quot;:3000,&quot;legacy&quot;:6,&quot;anyNumCopies&quot;:false,&quot;orderTable&quot;:266,&quot;orderDeck&quot;:295}," calcext:value-type="string">
            <text:p>{"id":"3-38","name":"司馬炎","displayName":"司馬炎","kana":"しばえん","traitText":null,"ruleText":"戦場に置かれたとき、自分の戦場のガーディアン1体につき、戦場のイジン1体を山札の下に戻す。","legacyText":"反魂","imageUrl":"https://one-draw.jp/ijinden/cardlist/003/card/03_038.png","expansion":35,"rarity":1,"type":1,"level":9,"color":8,"term":0,"trait":0,"power":3000,"legacy":6,"anyNumCopies":false,"orderTable":266,"orderDeck":295},</text:p>
          </table:table-cell>
          <table:table-cell table:number-columns-repeated="16356"/>
        </table:table-row>
        <table:table-row table:style-name="ro2">
          <table:table-cell table:style-name="ce11" office:value-type="float" office:value="267" calcext:value-type="float">
            <text:p>267</text:p>
          </table:table-cell>
          <table:table-cell table:style-name="ce11" office:value-type="float" office:value="288" calcext:value-type="float">
            <text:p>288</text:p>
          </table:table-cell>
          <table:table-cell table:style-name="ce21" office:value-type="string" calcext:value-type="string">
            <text:p>3-39</text:p>
          </table:table-cell>
          <table:table-cell table:style-name="ce21" office:value-type="float" office:value="39" calcext:value-type="float">
            <text:p>39</text:p>
          </table:table-cell>
          <table:table-cell table:style-name="ce11" office:value-type="string" calcext:value-type="string">
            <text:p>井伊直弼</text:p>
          </table:table-cell>
          <table:table-cell table:style-name="ce11" table:formula="of:=[.E268]" office:value-type="string" office:string-value="井伊直弼" calcext:value-type="string">
            <text:p>井伊直弼</text:p>
          </table:table-cell>
          <table:table-cell table:style-name="ce11" office:value-type="string" calcext:value-type="string">
            <text:p>いいなおすけ</text:p>
          </table:table-cell>
          <table:table-cell table:style-name="ce11" office:value-type="string" calcext:value-type="string">
            <text:p>第３弾ブースターパック</text:p>
          </table:table-cell>
          <table:table-cell table:style-name="ce11" table:formula="of:=VLOOKUP([.H268];[$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6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8];[$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8];[$色番号.$A$1:$色番号.$B$10];2;0)" office:value-type="float" office:value="8" calcext:value-type="float">
            <text:p>8</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68];[$特性番号.$A$1:$特性番号.$B$8];2;0);0)" office:value-type="float" office:value="0" calcext:value-type="float">
            <text:p>0</text:p>
          </table:table-cell>
          <table:table-cell table:style-name="ce11"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table:style-name="ce11" office:value-type="float" office:value="7000" calcext:value-type="float">
            <text:p>7000</text:p>
          </table:table-cell>
          <table:table-cell table:style-name="ce25" office:value-type="string" calcext:value-type="string">
            <text:p>魔力化</text:p>
          </table:table-cell>
          <table:table-cell table:style-name="ce11" table:formula="of:=IFERROR(VLOOKUP([.$X268];[$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39.png</text:p>
          </table:table-cell>
          <table:table-cell table:style-name="ce11" table:formula="of:=CONCATENATE([$JSON.$A$1];[.$C268];[$JSON.$B$1];[.$E268];[$JSON.$C$1];[.F268];[$JSON.$D$1];[.$G268];[$JSON.$E$1];IF(ISNA([.$T268]);&quot;null&quot;;&quot;&quot;&quot;&quot;&amp;[.$T268]&amp;&quot;&quot;&quot;&quot;);[$JSON.$F$1];[.$V268];[$JSON.$G$1];IF(ISNA([.$X268]);&quot;null&quot;;&quot;&quot;&quot;&quot;&amp;[.$X268]&amp;&quot;&quot;&quot;&quot;);[$JSON.$H$1];[.$AA268];[$JSON.$I$1];[.$I268];[$JSON.$J$1];[.K268];[$JSON.$K$1];[.$M268];[$JSON.$L$1];[.$P268];[$JSON.$M$1];[.$O268];[$JSON.$N$1];[.$S268];[$JSON.$O$1];[.$U268];[$JSON.$P$1];IF(ISNA([.$W268]);&quot;null&quot;;[.$W268]);[$JSON.$Q$1];[.$Y268];[$JSON.$R$1];IF([.$Z268];&quot;true&quot;;&quot;false&quot;);[$JSON.$S$1];[.$A268];[$JSON.$T$1];[.$B268];[$JSON.$U$1])" office:value-type="string" office:string-value="{&quot;id&quot;:&quot;3-39&quot;,&quot;name&quot;:&quot;井伊直弼&quot;,&quot;displayName&quot;:&quot;井伊直弼&quot;,&quot;kana&quot;:&quot;いいなおすけ&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rarity&quot;:1,&quot;type&quot;:1,&quot;level&quot;:8,&quot;color&quot;:8,&quot;term&quot;:0,&quot;trait&quot;:0,&quot;power&quot;:7000,&quot;legacy&quot;:1,&quot;anyNumCopies&quot;:false,&quot;orderTable&quot;:267,&quot;orderDeck&quot;:288}," calcext:value-type="string">
            <text:p>{"id":"3-39","name":"井伊直弼","displayName":"井伊直弼","kana":"いいなおすけ","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rarity":1,"type":1,"level":8,"color":8,"term":0,"trait":0,"power":7000,"legacy":1,"anyNumCopies":false,"orderTable":267,"orderDeck":288},</text:p>
          </table:table-cell>
          <table:table-cell table:number-columns-repeated="16356"/>
        </table:table-row>
        <table:table-row table:style-name="ro2">
          <table:table-cell table:style-name="ce11" office:value-type="float" office:value="268" calcext:value-type="float">
            <text:p>268</text:p>
          </table:table-cell>
          <table:table-cell table:style-name="ce11" office:value-type="float" office:value="123" calcext:value-type="float">
            <text:p>123</text:p>
          </table:table-cell>
          <table:table-cell table:style-name="ce21" office:value-type="string" calcext:value-type="string">
            <text:p>3-40</text:p>
          </table:table-cell>
          <table:table-cell table:style-name="ce21" office:value-type="float" office:value="40" calcext:value-type="float">
            <text:p>40</text:p>
          </table:table-cell>
          <table:table-cell table:style-name="ce11" office:value-type="string" calcext:value-type="string">
            <text:p>徳川家茂</text:p>
          </table:table-cell>
          <table:table-cell table:style-name="ce11" table:formula="of:=[.E269]" office:value-type="string" office:string-value="徳川家茂" calcext:value-type="string">
            <text:p>徳川家茂</text:p>
          </table:table-cell>
          <table:table-cell table:style-name="ce11" office:value-type="string" calcext:value-type="string">
            <text:p>とくがわいえもち</text:p>
          </table:table-cell>
          <table:table-cell table:style-name="ce11" office:value-type="string" calcext:value-type="string">
            <text:p>第３弾ブースターパック</text:p>
          </table:table-cell>
          <table:table-cell table:style-name="ce11" table:formula="of:=VLOOKUP([.H269];[$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6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69];[$種類番号.$A$1:$種類番号.$B$4];2;0)" office:value-type="float" office:value="1" calcext:value-type="float">
            <text:p>1</text:p>
          </table:table-cell>
          <table:table-cell table:style-name="ce11" office:value-type="string" calcext:value-type="string">
            <text:p>黄</text:p>
          </table:table-cell>
          <table:table-cell table:style-name="ce11" table:formula="of:=VLOOKUP([.N26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6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69];[$特性番号.$A$1:$特性番号.$B$8];2;0);0)" office:value-type="float" office:value="0" calcext:value-type="float">
            <text:p>0</text:p>
          </table:table-cell>
          <table:table-cell table:style-name="ce11" office:value-type="string" calcext:value-type="string">
            <text:p>レベル6以上のイジンが戦場に置かれたときに発動できる。戦場の他のイジンすべてを寝かせて、これを山札の下に戻す。</text:p>
          </table:table-cell>
          <table:table-cell table:style-name="ce11" office:value-type="float" office:value="2500" calcext:value-type="float">
            <text:p>2500</text:p>
          </table:table-cell>
          <table:table-cell table:style-name="ce25" table:formula="of:=NA()" office:value-type="string" office:string-value="" calcext:value-type="error">
            <text:p>#N/A</text:p>
          </table:table-cell>
          <table:table-cell table:style-name="ce11" table:formula="of:=IFERROR(VLOOKUP([.$X26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0.png</text:p>
          </table:table-cell>
          <table:table-cell table:style-name="ce11" table:formula="of:=CONCATENATE([$JSON.$A$1];[.$C269];[$JSON.$B$1];[.$E269];[$JSON.$C$1];[.F269];[$JSON.$D$1];[.$G269];[$JSON.$E$1];IF(ISNA([.$T269]);&quot;null&quot;;&quot;&quot;&quot;&quot;&amp;[.$T269]&amp;&quot;&quot;&quot;&quot;);[$JSON.$F$1];[.$V269];[$JSON.$G$1];IF(ISNA([.$X269]);&quot;null&quot;;&quot;&quot;&quot;&quot;&amp;[.$X269]&amp;&quot;&quot;&quot;&quot;);[$JSON.$H$1];[.$AA269];[$JSON.$I$1];[.$I269];[$JSON.$J$1];[.K269];[$JSON.$K$1];[.$M269];[$JSON.$L$1];[.$P269];[$JSON.$M$1];[.$O269];[$JSON.$N$1];[.$S269];[$JSON.$O$1];[.$U269];[$JSON.$P$1];IF(ISNA([.$W269]);&quot;null&quot;;[.$W269]);[$JSON.$Q$1];[.$Y269];[$JSON.$R$1];IF([.$Z269];&quot;true&quot;;&quot;false&quot;);[$JSON.$S$1];[.$A269];[$JSON.$T$1];[.$B269];[$JSON.$U$1])" office:value-type="string" office:string-value="{&quot;id&quot;:&quot;3-40&quot;,&quot;name&quot;:&quot;徳川家茂&quot;,&quot;displayName&quot;:&quot;徳川家茂&quot;,&quot;kana&quot;:&quot;とくがわいえもち&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rarity&quot;:1,&quot;type&quot;:1,&quot;level&quot;:3,&quot;color&quot;:8,&quot;term&quot;:0,&quot;trait&quot;:0,&quot;power&quot;:2500,&quot;legacy&quot;:0,&quot;anyNumCopies&quot;:false,&quot;orderTable&quot;:268,&quot;orderDeck&quot;:123}," calcext:value-type="string">
            <text:p>{"id":"3-40","name":"徳川家茂","displayName":"徳川家茂","kana":"とくがわいえもち","traitText":null,"ruleText":"レベル6以上のイジンが戦場に置かれたときに発動できる。戦場の他のイジンすべてを寝かせて、これを山札の下に戻す。","legacyText":null,"imageUrl":"https://one-draw.jp/ijinden/cardlist/003/card/03_040.png","expansion":35,"rarity":1,"type":1,"level":3,"color":8,"term":0,"trait":0,"power":2500,"legacy":0,"anyNumCopies":false,"orderTable":268,"orderDeck":123},</text:p>
          </table:table-cell>
          <table:table-cell table:number-columns-repeated="16356"/>
        </table:table-row>
        <table:table-row table:style-name="ro2">
          <table:table-cell table:style-name="ce11" office:value-type="float" office:value="269" calcext:value-type="float">
            <text:p>269</text:p>
          </table:table-cell>
          <table:table-cell table:style-name="ce11" office:value-type="float" office:value="274" calcext:value-type="float">
            <text:p>274</text:p>
          </table:table-cell>
          <table:table-cell table:style-name="ce21" office:value-type="string" calcext:value-type="string">
            <text:p>3-41</text:p>
          </table:table-cell>
          <table:table-cell table:style-name="ce21" office:value-type="float" office:value="41" calcext:value-type="float">
            <text:p>41</text:p>
          </table:table-cell>
          <table:table-cell table:style-name="ce11" office:value-type="string" calcext:value-type="string">
            <text:p>松平定信</text:p>
          </table:table-cell>
          <table:table-cell table:style-name="ce11" table:formula="of:=[.E270]" office:value-type="string" office:string-value="松平定信" calcext:value-type="string">
            <text:p>松平定信</text:p>
          </table:table-cell>
          <table:table-cell table:style-name="ce11" office:value-type="string" calcext:value-type="string">
            <text:p>まつだいらさだのぶ</text:p>
          </table:table-cell>
          <table:table-cell table:style-name="ce11" office:value-type="string" calcext:value-type="string">
            <text:p>第３弾ブースターパック</text:p>
          </table:table-cell>
          <table:table-cell table:style-name="ce11" table:formula="of:=VLOOKUP([.H270];[$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7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0];[$種類番号.$A$1:$種類番号.$B$4];2;0)" office:value-type="float" office:value="1" calcext:value-type="float">
            <text:p>1</text:p>
          </table:table-cell>
          <table:table-cell table:style-name="ce11" office:value-type="string" calcext:value-type="string">
            <text:p>黄</text:p>
          </table:table-cell>
          <table:table-cell table:style-name="ce11" table:formula="of:=VLOOKUP([.N270];[$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70];[$特性番号.$A$1:$特性番号.$B$8];2;0);0)" office:value-type="float" office:value="0" calcext:value-type="float">
            <text:p>0</text:p>
          </table:table-cell>
          <table:table-cell table:style-name="ce11"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table:style-name="ce11" office:value-type="float" office:value="6000" calcext:value-type="float">
            <text:p>6000</text:p>
          </table:table-cell>
          <table:table-cell table:style-name="ce25" office:value-type="string" calcext:value-type="string">
            <text:p>山札の上か下に戻す</text:p>
          </table:table-cell>
          <table:table-cell table:style-name="ce11" table:formula="of:=IFERROR(VLOOKUP([.$X27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1.png</text:p>
          </table:table-cell>
          <table:table-cell table:style-name="ce11" table:formula="of:=CONCATENATE([$JSON.$A$1];[.$C270];[$JSON.$B$1];[.$E270];[$JSON.$C$1];[.F270];[$JSON.$D$1];[.$G270];[$JSON.$E$1];IF(ISNA([.$T270]);&quot;null&quot;;&quot;&quot;&quot;&quot;&amp;[.$T270]&amp;&quot;&quot;&quot;&quot;);[$JSON.$F$1];[.$V270];[$JSON.$G$1];IF(ISNA([.$X270]);&quot;null&quot;;&quot;&quot;&quot;&quot;&amp;[.$X270]&amp;&quot;&quot;&quot;&quot;);[$JSON.$H$1];[.$AA270];[$JSON.$I$1];[.$I270];[$JSON.$J$1];[.K270];[$JSON.$K$1];[.$M270];[$JSON.$L$1];[.$P270];[$JSON.$M$1];[.$O270];[$JSON.$N$1];[.$S270];[$JSON.$O$1];[.$U270];[$JSON.$P$1];IF(ISNA([.$W270]);&quot;null&quot;;[.$W270]);[$JSON.$Q$1];[.$Y270];[$JSON.$R$1];IF([.$Z270];&quot;true&quot;;&quot;false&quot;);[$JSON.$S$1];[.$A270];[$JSON.$T$1];[.$B270];[$JSON.$U$1])" office:value-type="string" office:string-value="{&quot;id&quot;:&quot;3-41&quot;,&quot;name&quot;:&quot;松平定信&quot;,&quot;displayName&quot;:&quot;松平定信&quot;,&quot;kana&quot;:&quot;まつだいらさだのぶ&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rarity&quot;:1,&quot;type&quot;:1,&quot;level&quot;:7,&quot;color&quot;:8,&quot;term&quot;:0,&quot;trait&quot;:0,&quot;power&quot;:6000,&quot;legacy&quot;:7,&quot;anyNumCopies&quot;:false,&quot;orderTable&quot;:269,&quot;orderDeck&quot;:274}," calcext:value-type="string">
            <text:p>{"id":"3-41","name":"松平定信","displayName":"松平定信","kana":"まつだいらさだのぶ","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rarity":1,"type":1,"level":7,"color":8,"term":0,"trait":0,"power":6000,"legacy":7,"anyNumCopies":false,"orderTable":269,"orderDeck":274},</text:p>
          </table:table-cell>
          <table:table-cell table:number-columns-repeated="16356"/>
        </table:table-row>
        <table:table-row table:style-name="ro2">
          <table:table-cell table:style-name="ce11" office:value-type="float" office:value="270" calcext:value-type="float">
            <text:p>270</text:p>
          </table:table-cell>
          <table:table-cell table:style-name="ce11" office:value-type="float" office:value="70" calcext:value-type="float">
            <text:p>70</text:p>
          </table:table-cell>
          <table:table-cell table:style-name="ce21" office:value-type="string" calcext:value-type="string">
            <text:p>3-42</text:p>
          </table:table-cell>
          <table:table-cell table:style-name="ce21" office:value-type="float" office:value="42" calcext:value-type="float">
            <text:p>42</text:p>
          </table:table-cell>
          <table:table-cell table:style-name="ce11" office:value-type="string" calcext:value-type="string">
            <text:p>ルイス・キャロル</text:p>
          </table:table-cell>
          <table:table-cell table:style-name="ce11" table:formula="of:=[.E271]" office:value-type="string" office:string-value="ルイス・キャロル" calcext:value-type="string">
            <text:p>ルイス・キャロル</text:p>
          </table:table-cell>
          <table:table-cell table:style-name="ce11" office:value-type="string" calcext:value-type="string">
            <text:p>るいすきゃろる</text:p>
          </table:table-cell>
          <table:table-cell table:style-name="ce11" office:value-type="string" calcext:value-type="string">
            <text:p>第３弾ブースターパック</text:p>
          </table:table-cell>
          <table:table-cell table:style-name="ce11" table:formula="of:=VLOOKUP([.H271];[$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71];[$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1];[$種類番号.$A$1:$種類番号.$B$4];2;0)" office:value-type="float" office:value="1" calcext:value-type="float">
            <text:p>1</text:p>
          </table:table-cell>
          <table:table-cell table:style-name="ce11" office:value-type="string" calcext:value-type="string">
            <text:p>黄</text:p>
          </table:table-cell>
          <table:table-cell table:style-name="ce11" table:formula="of:=VLOOKUP([.N271];[$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71];[$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271];[$特性番号.$A$1:$特性番号.$B$8];2;0);0)" office:value-type="float" office:value="0" calcext:value-type="float">
            <text:p>0</text:p>
          </table:table-cell>
          <table:table-cell table:style-name="ce11"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table:style-name="ce11"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27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2.png</text:p>
          </table:table-cell>
          <table:table-cell table:style-name="ce11" table:formula="of:=CONCATENATE([$JSON.$A$1];[.$C271];[$JSON.$B$1];[.$E271];[$JSON.$C$1];[.F271];[$JSON.$D$1];[.$G271];[$JSON.$E$1];IF(ISNA([.$T271]);&quot;null&quot;;&quot;&quot;&quot;&quot;&amp;[.$T271]&amp;&quot;&quot;&quot;&quot;);[$JSON.$F$1];[.$V271];[$JSON.$G$1];IF(ISNA([.$X271]);&quot;null&quot;;&quot;&quot;&quot;&quot;&amp;[.$X271]&amp;&quot;&quot;&quot;&quot;);[$JSON.$H$1];[.$AA271];[$JSON.$I$1];[.$I271];[$JSON.$J$1];[.K271];[$JSON.$K$1];[.$M271];[$JSON.$L$1];[.$P271];[$JSON.$M$1];[.$O271];[$JSON.$N$1];[.$S271];[$JSON.$O$1];[.$U271];[$JSON.$P$1];IF(ISNA([.$W271]);&quot;null&quot;;[.$W271]);[$JSON.$Q$1];[.$Y271];[$JSON.$R$1];IF([.$Z271];&quot;true&quot;;&quot;false&quot;);[$JSON.$S$1];[.$A271];[$JSON.$T$1];[.$B271];[$JSON.$U$1])" office:value-type="string" office:string-value="{&quot;id&quot;:&quot;3-42&quot;,&quot;name&quot;:&quot;ルイス・キャロル&quot;,&quot;displayName&quot;:&quot;ルイス・キャロル&quot;,&quot;kana&quot;:&quot;るいすきゃろる&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rarity&quot;:2,&quot;type&quot;:1,&quot;level&quot;:2,&quot;color&quot;:8,&quot;term&quot;:2,&quot;trait&quot;:0,&quot;power&quot;:500,&quot;legacy&quot;:0,&quot;anyNumCopies&quot;:false,&quot;orderTable&quot;:270,&quot;orderDeck&quot;:70}," calcext:value-type="string">
            <text:p>{"id":"3-42","name":"ルイス・キャロル","displayName":"ルイス・キャロル","kana":"るいすきゃろる","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rarity":2,"type":1,"level":2,"color":8,"term":2,"trait":0,"power":500,"legacy":0,"anyNumCopies":false,"orderTable":270,"orderDeck":70},</text:p>
          </table:table-cell>
          <table:table-cell table:number-columns-repeated="16356"/>
        </table:table-row>
        <table:table-row table:style-name="ro2">
          <table:table-cell table:style-name="ce11" office:value-type="float" office:value="271" calcext:value-type="float">
            <text:p>271</text:p>
          </table:table-cell>
          <table:table-cell table:style-name="ce11" office:value-type="float" office:value="26" calcext:value-type="float">
            <text:p>26</text:p>
          </table:table-cell>
          <table:table-cell table:style-name="ce21" office:value-type="string" calcext:value-type="string">
            <text:p>3-43</text:p>
          </table:table-cell>
          <table:table-cell table:style-name="ce21" office:value-type="float" office:value="43" calcext:value-type="float">
            <text:p>43</text:p>
          </table:table-cell>
          <table:table-cell table:style-name="ce11" office:value-type="string" calcext:value-type="string">
            <text:p>芹沢鴨</text:p>
          </table:table-cell>
          <table:table-cell table:style-name="ce11" table:formula="of:=[.E272]" office:value-type="string" office:string-value="芹沢鴨" calcext:value-type="string">
            <text:p>芹沢鴨</text:p>
          </table:table-cell>
          <table:table-cell table:style-name="ce11" office:value-type="string" calcext:value-type="string">
            <text:p>せりざわかも</text:p>
          </table:table-cell>
          <table:table-cell table:style-name="ce11" office:value-type="string" calcext:value-type="string">
            <text:p>第３弾ブースターパック</text:p>
          </table:table-cell>
          <table:table-cell table:style-name="ce11" table:formula="of:=VLOOKUP([.H272];[$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7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2];[$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2];[$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2];[$能力語番号.$A$1:$能力語番号.$B$11];2;0);0)" office:value-type="float" office:value="0" calcext:value-type="float">
            <text:p>0</text:p>
          </table:table-cell>
          <table:table-cell office:value-type="string" calcext:value-type="string">
            <text:p>志願</text:p>
          </table:table-cell>
          <table:table-cell table:style-name="ce11" table:formula="of:=IFERROR(VLOOKUP([.$T272];[$特性番号.$A$1:$特性番号.$B$8];2;0);0)" office:value-type="float" office:value="32" calcext:value-type="float">
            <text:p>32</text:p>
          </table:table-cell>
          <table:table-cell table:style-name="ce11" office:value-type="string" calcext:value-type="string">
            <text:p>戦場に置かれたとき、相手の手札のカード1つを墓地に置く。そのカードは相手が選ぶ。自分の手札のカード1つを墓地に置く。</text:p>
          </table:table-cell>
          <table:table-cell table:style-name="ce11" office:value-type="float" office:value="500" calcext:value-type="float">
            <text:p>500</text:p>
          </table:table-cell>
          <table:table-cell table:style-name="ce25" office:value-type="string" calcext:value-type="string">
            <text:p>1ドローする</text:p>
          </table:table-cell>
          <table:table-cell table:style-name="ce11" table:formula="of:=IFERROR(VLOOKUP([.$X27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3.png</text:p>
          </table:table-cell>
          <table:table-cell table:style-name="ce11" table:formula="of:=CONCATENATE([$JSON.$A$1];[.$C272];[$JSON.$B$1];[.$E272];[$JSON.$C$1];[.F272];[$JSON.$D$1];[.$G272];[$JSON.$E$1];IF(ISNA([.$T272]);&quot;null&quot;;&quot;&quot;&quot;&quot;&amp;[.$T272]&amp;&quot;&quot;&quot;&quot;);[$JSON.$F$1];[.$V272];[$JSON.$G$1];IF(ISNA([.$X272]);&quot;null&quot;;&quot;&quot;&quot;&quot;&amp;[.$X272]&amp;&quot;&quot;&quot;&quot;);[$JSON.$H$1];[.$AA272];[$JSON.$I$1];[.$I272];[$JSON.$J$1];[.K272];[$JSON.$K$1];[.$M272];[$JSON.$L$1];[.$P272];[$JSON.$M$1];[.$O272];[$JSON.$N$1];[.$S272];[$JSON.$O$1];[.$U272];[$JSON.$P$1];IF(ISNA([.$W272]);&quot;null&quot;;[.$W272]);[$JSON.$Q$1];[.$Y272];[$JSON.$R$1];IF([.$Z272];&quot;true&quot;;&quot;false&quot;);[$JSON.$S$1];[.$A272];[$JSON.$T$1];[.$B272];[$JSON.$U$1])" office:value-type="string" office:string-value="{&quot;id&quot;:&quot;3-43&quot;,&quot;name&quot;:&quot;芹沢鴨&quot;,&quot;displayName&quot;:&quot;芹沢鴨&quot;,&quot;kana&quot;:&quot;せりざわかも&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rarity&quot;:1,&quot;type&quot;:1,&quot;level&quot;:1,&quot;color&quot;:16,&quot;term&quot;:0,&quot;trait&quot;:32,&quot;power&quot;:500,&quot;legacy&quot;:4,&quot;anyNumCopies&quot;:false,&quot;orderTable&quot;:271,&quot;orderDeck&quot;:26}," calcext:value-type="string">
            <text:p>{"id":"3-43","name":"芹沢鴨","displayName":"芹沢鴨","kana":"せりざわかも","traitText":"志願","ruleText":"戦場に置かれたとき、相手の手札のカード1つを墓地に置く。そのカードは相手が選ぶ。自分の手札のカード1つを墓地に置く。","legacyText":"1ドローする","imageUrl":"https://one-draw.jp/ijinden/cardlist/003/card/03_043.png","expansion":35,"rarity":1,"type":1,"level":1,"color":16,"term":0,"trait":32,"power":500,"legacy":4,"anyNumCopies":false,"orderTable":271,"orderDeck":26},</text:p>
          </table:table-cell>
          <table:table-cell table:number-columns-repeated="16356"/>
        </table:table-row>
        <table:table-row table:style-name="ro2">
          <table:table-cell table:style-name="ce11" office:value-type="float" office:value="272" calcext:value-type="float">
            <text:p>272</text:p>
          </table:table-cell>
          <table:table-cell table:style-name="ce11" office:value-type="float" office:value="177" calcext:value-type="float">
            <text:p>177</text:p>
          </table:table-cell>
          <table:table-cell table:style-name="ce21" office:value-type="string" calcext:value-type="string">
            <text:p>3-44</text:p>
          </table:table-cell>
          <table:table-cell table:style-name="ce21" office:value-type="float" office:value="44" calcext:value-type="float">
            <text:p>44</text:p>
          </table:table-cell>
          <table:table-cell table:style-name="ce11" office:value-type="string" calcext:value-type="string">
            <text:p>本居宣長</text:p>
          </table:table-cell>
          <table:table-cell table:style-name="ce11" table:formula="of:=[.E273]" office:value-type="string" office:string-value="本居宣長" calcext:value-type="string">
            <text:p>本居宣長</text:p>
          </table:table-cell>
          <table:table-cell table:style-name="ce11" office:value-type="string" calcext:value-type="string">
            <text:p>もとおりのりなが</text:p>
          </table:table-cell>
          <table:table-cell table:style-name="ce11" office:value-type="string" calcext:value-type="string">
            <text:p>第３弾ブースターパック</text:p>
          </table:table-cell>
          <table:table-cell table:style-name="ce11" table:formula="of:=VLOOKUP([.H273];[$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7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3];[$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3];[$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3];[$能力語番号.$A$1:$能力語番号.$B$11];2;0);0)" office:value-type="float" office:value="0" calcext:value-type="float">
            <text:p>0</text:p>
          </table:table-cell>
          <table:table-cell office:value-type="string" calcext:value-type="string">
            <text:p>医術</text:p>
          </table:table-cell>
          <table:table-cell table:style-name="ce11" table:formula="of:=IFERROR(VLOOKUP([.$T273];[$特性番号.$A$1:$特性番号.$B$8];2;0);0)" office:value-type="float" office:value="16" calcext:value-type="float">
            <text:p>16</text:p>
          </table:table-cell>
          <table:table-cell table:style-name="ce11" office:value-type="string" calcext:value-type="string">
            <text:p>「医術」イジンが自分の戦場に置かれたときに発動できる。1ドローする。相手は1ドローする。</text:p>
          </table:table-cell>
          <table:table-cell table:style-name="ce11" office:value-type="float" office:value="3500" calcext:value-type="float">
            <text:p>3500</text:p>
          </table:table-cell>
          <table:table-cell table:style-name="ce25" office:value-type="string" calcext:value-type="string">
            <text:p>木霊</text:p>
          </table:table-cell>
          <table:table-cell table:style-name="ce11" table:formula="of:=IFERROR(VLOOKUP([.$X273];[$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4.png</text:p>
          </table:table-cell>
          <table:table-cell table:style-name="ce11" table:formula="of:=CONCATENATE([$JSON.$A$1];[.$C273];[$JSON.$B$1];[.$E273];[$JSON.$C$1];[.F273];[$JSON.$D$1];[.$G273];[$JSON.$E$1];IF(ISNA([.$T273]);&quot;null&quot;;&quot;&quot;&quot;&quot;&amp;[.$T273]&amp;&quot;&quot;&quot;&quot;);[$JSON.$F$1];[.$V273];[$JSON.$G$1];IF(ISNA([.$X273]);&quot;null&quot;;&quot;&quot;&quot;&quot;&amp;[.$X273]&amp;&quot;&quot;&quot;&quot;);[$JSON.$H$1];[.$AA273];[$JSON.$I$1];[.$I273];[$JSON.$J$1];[.K273];[$JSON.$K$1];[.$M273];[$JSON.$L$1];[.$P273];[$JSON.$M$1];[.$O273];[$JSON.$N$1];[.$S273];[$JSON.$O$1];[.$U273];[$JSON.$P$1];IF(ISNA([.$W273]);&quot;null&quot;;[.$W273]);[$JSON.$Q$1];[.$Y273];[$JSON.$R$1];IF([.$Z273];&quot;true&quot;;&quot;false&quot;);[$JSON.$S$1];[.$A273];[$JSON.$T$1];[.$B273];[$JSON.$U$1])" office:value-type="string" office:string-value="{&quot;id&quot;:&quot;3-44&quot;,&quot;name&quot;:&quot;本居宣長&quot;,&quot;displayName&quot;:&quot;本居宣長&quot;,&quot;kana&quot;:&quot;もとおりのりなが&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rarity&quot;:1,&quot;type&quot;:1,&quot;level&quot;:4,&quot;color&quot;:16,&quot;term&quot;:0,&quot;trait&quot;:16,&quot;power&quot;:3500,&quot;legacy&quot;:8,&quot;anyNumCopies&quot;:false,&quot;orderTable&quot;:272,&quot;orderDeck&quot;:177}," calcext:value-type="string">
            <text:p>{"id":"3-44","name":"本居宣長","displayName":"本居宣長","kana":"もとおりのりなが","traitText":"医術","ruleText":"「医術」イジンが自分の戦場に置かれたときに発動できる。1ドローする。相手は1ドローする。","legacyText":"木霊","imageUrl":"https://one-draw.jp/ijinden/cardlist/003/card/03_044.png","expansion":35,"rarity":1,"type":1,"level":4,"color":16,"term":0,"trait":16,"power":3500,"legacy":8,"anyNumCopies":false,"orderTable":272,"orderDeck":177},</text:p>
          </table:table-cell>
          <table:table-cell table:number-columns-repeated="16356"/>
        </table:table-row>
        <table:table-row table:style-name="ro2">
          <table:table-cell table:style-name="ce11" office:value-type="float" office:value="273" calcext:value-type="float">
            <text:p>273</text:p>
          </table:table-cell>
          <table:table-cell table:style-name="ce11" office:value-type="float" office:value="131" calcext:value-type="float">
            <text:p>131</text:p>
          </table:table-cell>
          <table:table-cell table:style-name="ce21" office:value-type="string" calcext:value-type="string">
            <text:p>3-45</text:p>
          </table:table-cell>
          <table:table-cell table:style-name="ce21" office:value-type="float" office:value="45" calcext:value-type="float">
            <text:p>45</text:p>
          </table:table-cell>
          <table:table-cell table:style-name="ce11" office:value-type="string" calcext:value-type="string">
            <text:p>坂本龍馬</text:p>
          </table:table-cell>
          <table:table-cell table:style-name="ce11" table:formula="of:=[.E274]" office:value-type="string" office:string-value="坂本龍馬" calcext:value-type="string">
            <text:p>坂本龍馬</text:p>
          </table:table-cell>
          <table:table-cell table:style-name="ce11" office:value-type="string" calcext:value-type="string">
            <text:p>さかもとりょうま</text:p>
          </table:table-cell>
          <table:table-cell table:style-name="ce11" office:value-type="string" calcext:value-type="string">
            <text:p>第３弾ブースターパック</text:p>
          </table:table-cell>
          <table:table-cell table:style-name="ce11" table:formula="of:=VLOOKUP([.H274];[$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74];[$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4];[$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4];[$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74];[$特性番号.$A$1:$特性番号.$B$8];2;0);0)" office:value-type="float" office:value="0" calcext:value-type="float">
            <text:p>0</text:p>
          </table:table-cell>
          <table:table-cell table:style-name="ce11"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table:style-name="ce11"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27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5.png</text:p>
          </table:table-cell>
          <table:table-cell table:style-name="ce11" table:formula="of:=CONCATENATE([$JSON.$A$1];[.$C274];[$JSON.$B$1];[.$E274];[$JSON.$C$1];[.F274];[$JSON.$D$1];[.$G274];[$JSON.$E$1];IF(ISNA([.$T274]);&quot;null&quot;;&quot;&quot;&quot;&quot;&amp;[.$T274]&amp;&quot;&quot;&quot;&quot;);[$JSON.$F$1];[.$V274];[$JSON.$G$1];IF(ISNA([.$X274]);&quot;null&quot;;&quot;&quot;&quot;&quot;&amp;[.$X274]&amp;&quot;&quot;&quot;&quot;);[$JSON.$H$1];[.$AA274];[$JSON.$I$1];[.$I274];[$JSON.$J$1];[.K274];[$JSON.$K$1];[.$M274];[$JSON.$L$1];[.$P274];[$JSON.$M$1];[.$O274];[$JSON.$N$1];[.$S274];[$JSON.$O$1];[.$U274];[$JSON.$P$1];IF(ISNA([.$W274]);&quot;null&quot;;[.$W274]);[$JSON.$Q$1];[.$Y274];[$JSON.$R$1];IF([.$Z274];&quot;true&quot;;&quot;false&quot;);[$JSON.$S$1];[.$A274];[$JSON.$T$1];[.$B274];[$JSON.$U$1])" office:value-type="string" office:string-value="{&quot;id&quot;:&quot;3-45&quot;,&quot;name&quot;:&quot;坂本龍馬&quot;,&quot;displayName&quot;:&quot;坂本龍馬&quot;,&quot;kana&quot;:&quot;さかもとりょうま&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rarity&quot;:2,&quot;type&quot;:1,&quot;level&quot;:3,&quot;color&quot;:16,&quot;term&quot;:0,&quot;trait&quot;:0,&quot;power&quot;:3000,&quot;legacy&quot;:0,&quot;anyNumCopies&quot;:false,&quot;orderTable&quot;:273,&quot;orderDeck&quot;:131}," calcext:value-type="string">
            <text:p>{"id":"3-45","name":"坂本龍馬","displayName":"坂本龍馬","kana":"さかもとりょうま","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rarity":2,"type":1,"level":3,"color":16,"term":0,"trait":0,"power":3000,"legacy":0,"anyNumCopies":false,"orderTable":273,"orderDeck":131},</text:p>
          </table:table-cell>
          <table:table-cell table:number-columns-repeated="16356"/>
        </table:table-row>
        <table:table-row table:style-name="ro2">
          <table:table-cell table:style-name="ce11" office:value-type="float" office:value="274" calcext:value-type="float">
            <text:p>274</text:p>
          </table:table-cell>
          <table:table-cell table:style-name="ce11" office:value-type="float" office:value="276" calcext:value-type="float">
            <text:p>276</text:p>
          </table:table-cell>
          <table:table-cell table:style-name="ce21" office:value-type="string" calcext:value-type="string">
            <text:p>3-46</text:p>
          </table:table-cell>
          <table:table-cell table:style-name="ce21" office:value-type="float" office:value="46" calcext:value-type="float">
            <text:p>46</text:p>
          </table:table-cell>
          <table:table-cell table:style-name="ce11" office:value-type="string" calcext:value-type="string">
            <text:p>近藤勇</text:p>
          </table:table-cell>
          <table:table-cell table:style-name="ce11" table:formula="of:=[.E275]" office:value-type="string" office:string-value="近藤勇" calcext:value-type="string">
            <text:p>近藤勇</text:p>
          </table:table-cell>
          <table:table-cell table:style-name="ce11" office:value-type="string" calcext:value-type="string">
            <text:p>こんどういさみ</text:p>
          </table:table-cell>
          <table:table-cell table:style-name="ce11" office:value-type="string" calcext:value-type="string">
            <text:p>第３弾ブースターパック</text:p>
          </table:table-cell>
          <table:table-cell table:style-name="ce11" table:formula="of:=VLOOKUP([.H275];[$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7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5];[$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5];[$色番号.$A$1:$色番号.$B$10];2;0)" office:value-type="float" office:value="16" calcext:value-type="float">
            <text:p>16</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5];[$能力語番号.$A$1:$能力語番号.$B$11];2;0);0)" office:value-type="float" office:value="0" calcext:value-type="float">
            <text:p>0</text:p>
          </table:table-cell>
          <table:table-cell office:value-type="string" calcext:value-type="string">
            <text:p>志願</text:p>
          </table:table-cell>
          <table:table-cell table:style-name="ce11" table:formula="of:=IFERROR(VLOOKUP([.$T275];[$特性番号.$A$1:$特性番号.$B$8];2;0);0)" office:value-type="float" office:value="32" calcext:value-type="float">
            <text:p>32</text:p>
          </table:table-cell>
          <table:table-cell table:style-name="ce11"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27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6.png</text:p>
          </table:table-cell>
          <table:table-cell table:style-name="ce11" table:formula="of:=CONCATENATE([$JSON.$A$1];[.$C275];[$JSON.$B$1];[.$E275];[$JSON.$C$1];[.F275];[$JSON.$D$1];[.$G275];[$JSON.$E$1];IF(ISNA([.$T275]);&quot;null&quot;;&quot;&quot;&quot;&quot;&amp;[.$T275]&amp;&quot;&quot;&quot;&quot;);[$JSON.$F$1];[.$V275];[$JSON.$G$1];IF(ISNA([.$X275]);&quot;null&quot;;&quot;&quot;&quot;&quot;&amp;[.$X275]&amp;&quot;&quot;&quot;&quot;);[$JSON.$H$1];[.$AA275];[$JSON.$I$1];[.$I275];[$JSON.$J$1];[.K275];[$JSON.$K$1];[.$M275];[$JSON.$L$1];[.$P275];[$JSON.$M$1];[.$O275];[$JSON.$N$1];[.$S275];[$JSON.$O$1];[.$U275];[$JSON.$P$1];IF(ISNA([.$W275]);&quot;null&quot;;[.$W275]);[$JSON.$Q$1];[.$Y275];[$JSON.$R$1];IF([.$Z275];&quot;true&quot;;&quot;false&quot;);[$JSON.$S$1];[.$A275];[$JSON.$T$1];[.$B275];[$JSON.$U$1])" office:value-type="string" office:string-value="{&quot;id&quot;:&quot;3-46&quot;,&quot;name&quot;:&quot;近藤勇&quot;,&quot;displayName&quot;:&quot;近藤勇&quot;,&quot;kana&quot;:&quot;こんどういさみ&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rarity&quot;:1,&quot;type&quot;:1,&quot;level&quot;:7,&quot;color&quot;:16,&quot;term&quot;:0,&quot;trait&quot;:32,&quot;power&quot;:2000,&quot;legacy&quot;:0,&quot;anyNumCopies&quot;:false,&quot;orderTable&quot;:274,&quot;orderDeck&quot;:276}," calcext:value-type="string">
            <text:p>{"id":"3-46","name":"近藤勇","displayName":"近藤勇","kana":"こんどういさみ","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rarity":1,"type":1,"level":7,"color":16,"term":0,"trait":32,"power":2000,"legacy":0,"anyNumCopies":false,"orderTable":274,"orderDeck":276},</text:p>
          </table:table-cell>
          <table:table-cell table:number-columns-repeated="16356"/>
        </table:table-row>
        <table:table-row table:style-name="ro2">
          <table:table-cell table:style-name="ce11" office:value-type="float" office:value="275" calcext:value-type="float">
            <text:p>275</text:p>
          </table:table-cell>
          <table:table-cell table:style-name="ce11" office:value-type="float" office:value="27" calcext:value-type="float">
            <text:p>27</text:p>
          </table:table-cell>
          <table:table-cell table:style-name="ce21" office:value-type="string" calcext:value-type="string">
            <text:p>3-47</text:p>
          </table:table-cell>
          <table:table-cell table:style-name="ce21" office:value-type="float" office:value="47" calcext:value-type="float">
            <text:p>47</text:p>
          </table:table-cell>
          <table:table-cell table:style-name="ce11" office:value-type="string" calcext:value-type="string">
            <text:p>徳川慶喜</text:p>
          </table:table-cell>
          <table:table-cell table:style-name="ce11" table:formula="of:=[.E276]" office:value-type="string" office:string-value="徳川慶喜" calcext:value-type="string">
            <text:p>徳川慶喜</text:p>
          </table:table-cell>
          <table:table-cell table:style-name="ce11" office:value-type="string" calcext:value-type="string">
            <text:p>とくがわよしのぶ</text:p>
          </table:table-cell>
          <table:table-cell table:style-name="ce11" office:value-type="string" calcext:value-type="string">
            <text:p>第３弾ブースターパック</text:p>
          </table:table-cell>
          <table:table-cell table:style-name="ce11" table:formula="of:=VLOOKUP([.H276];[$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7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6];[$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76];[$特性番号.$A$1:$特性番号.$B$8];2;0);0)" office:value-type="float" office:value="0" calcext:value-type="float">
            <text:p>0</text:p>
          </table:table-cell>
          <table:table-cell table:style-name="ce11" office:value-type="string" calcext:value-type="string">
            <text:p>戦場の能力によって相手がドローしたとき、相手の手札のカード1つを墓地に置く。そのカードは相手が選ぶ。</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27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7.png</text:p>
          </table:table-cell>
          <table:table-cell table:style-name="ce11" table:formula="of:=CONCATENATE([$JSON.$A$1];[.$C276];[$JSON.$B$1];[.$E276];[$JSON.$C$1];[.F276];[$JSON.$D$1];[.$G276];[$JSON.$E$1];IF(ISNA([.$T276]);&quot;null&quot;;&quot;&quot;&quot;&quot;&amp;[.$T276]&amp;&quot;&quot;&quot;&quot;);[$JSON.$F$1];[.$V276];[$JSON.$G$1];IF(ISNA([.$X276]);&quot;null&quot;;&quot;&quot;&quot;&quot;&amp;[.$X276]&amp;&quot;&quot;&quot;&quot;);[$JSON.$H$1];[.$AA276];[$JSON.$I$1];[.$I276];[$JSON.$J$1];[.K276];[$JSON.$K$1];[.$M276];[$JSON.$L$1];[.$P276];[$JSON.$M$1];[.$O276];[$JSON.$N$1];[.$S276];[$JSON.$O$1];[.$U276];[$JSON.$P$1];IF(ISNA([.$W276]);&quot;null&quot;;[.$W276]);[$JSON.$Q$1];[.$Y276];[$JSON.$R$1];IF([.$Z276];&quot;true&quot;;&quot;false&quot;);[$JSON.$S$1];[.$A276];[$JSON.$T$1];[.$B276];[$JSON.$U$1])" office:value-type="string" office:string-value="{&quot;id&quot;:&quot;3-47&quot;,&quot;name&quot;:&quot;徳川慶喜&quot;,&quot;displayName&quot;:&quot;徳川慶喜&quot;,&quot;kana&quot;:&quot;とくがわよしのぶ&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rarity&quot;:1,&quot;type&quot;:1,&quot;level&quot;:1,&quot;color&quot;:16,&quot;term&quot;:0,&quot;trait&quot;:0,&quot;power&quot;:1000,&quot;legacy&quot;:0,&quot;anyNumCopies&quot;:false,&quot;orderTable&quot;:275,&quot;orderDeck&quot;:27}," calcext:value-type="string">
            <text:p>{"id":"3-47","name":"徳川慶喜","displayName":"徳川慶喜","kana":"とくがわよしのぶ","traitText":null,"ruleText":"戦場の能力によって相手がドローしたとき、相手の手札のカード1つを墓地に置く。そのカードは相手が選ぶ。","legacyText":null,"imageUrl":"https://one-draw.jp/ijinden/cardlist/003/card/03_047.png","expansion":35,"rarity":1,"type":1,"level":1,"color":16,"term":0,"trait":0,"power":1000,"legacy":0,"anyNumCopies":false,"orderTable":275,"orderDeck":27},</text:p>
          </table:table-cell>
          <table:table-cell table:number-columns-repeated="16356"/>
        </table:table-row>
        <table:table-row table:style-name="ro2">
          <table:table-cell table:style-name="ce11" office:value-type="float" office:value="276" calcext:value-type="float">
            <text:p>276</text:p>
          </table:table-cell>
          <table:table-cell table:style-name="ce11" office:value-type="float" office:value="178" calcext:value-type="float">
            <text:p>178</text:p>
          </table:table-cell>
          <table:table-cell table:style-name="ce21" office:value-type="string" calcext:value-type="string">
            <text:p>3-48</text:p>
          </table:table-cell>
          <table:table-cell table:style-name="ce21" office:value-type="float" office:value="48" calcext:value-type="float">
            <text:p>48</text:p>
          </table:table-cell>
          <table:table-cell table:style-name="ce11" office:value-type="string" calcext:value-type="string">
            <text:p>マシュー・カルブレイス・ペリー</text:p>
          </table:table-cell>
          <table:table-cell table:style-name="ce11" table:formula="of:=[.E277]" office:value-type="string" office:string-value="マシュー・カルブレイス・ペリー" calcext:value-type="string">
            <text:p>マシュー・カルブレイス・ペリー</text:p>
          </table:table-cell>
          <table:table-cell table:style-name="ce11" office:value-type="string" calcext:value-type="string">
            <text:p>ましゅーかるぶれいすぺりー</text:p>
          </table:table-cell>
          <table:table-cell table:style-name="ce11" office:value-type="string" calcext:value-type="string">
            <text:p>第３弾ブースターパック</text:p>
          </table:table-cell>
          <table:table-cell table:style-name="ce11" table:formula="of:=VLOOKUP([.H277];[$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7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277];[$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7];[$色番号.$A$1:$色番号.$B$10];2;0)" office:value-type="float" office:value="16" calcext:value-type="float">
            <text:p>16</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77];[$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277];[$特性番号.$A$1:$特性番号.$B$8];2;0);0)" office:value-type="float" office:value="0" calcext:value-type="float">
            <text:p>0</text:p>
          </table:table-cell>
          <table:table-cell table:style-name="ce11"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table:style-name="ce11" office:value-type="float" office:value="3500" calcext:value-type="float">
            <text:p>3500</text:p>
          </table:table-cell>
          <table:table-cell table:style-name="ce25" table:formula="of:=NA()" office:value-type="string" office:string-value="" calcext:value-type="error">
            <text:p>#N/A</text:p>
          </table:table-cell>
          <table:table-cell table:style-name="ce11" table:formula="of:=IFERROR(VLOOKUP([.$X27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8.png</text:p>
          </table:table-cell>
          <table:table-cell table:style-name="ce11" table:formula="of:=CONCATENATE([$JSON.$A$1];[.$C277];[$JSON.$B$1];[.$E277];[$JSON.$C$1];[.F277];[$JSON.$D$1];[.$G277];[$JSON.$E$1];IF(ISNA([.$T277]);&quot;null&quot;;&quot;&quot;&quot;&quot;&amp;[.$T277]&amp;&quot;&quot;&quot;&quot;);[$JSON.$F$1];[.$V277];[$JSON.$G$1];IF(ISNA([.$X277]);&quot;null&quot;;&quot;&quot;&quot;&quot;&amp;[.$X277]&amp;&quot;&quot;&quot;&quot;);[$JSON.$H$1];[.$AA277];[$JSON.$I$1];[.$I277];[$JSON.$J$1];[.K277];[$JSON.$K$1];[.$M277];[$JSON.$L$1];[.$P277];[$JSON.$M$1];[.$O277];[$JSON.$N$1];[.$S277];[$JSON.$O$1];[.$U277];[$JSON.$P$1];IF(ISNA([.$W277]);&quot;null&quot;;[.$W277]);[$JSON.$Q$1];[.$Y277];[$JSON.$R$1];IF([.$Z277];&quot;true&quot;;&quot;false&quot;);[$JSON.$S$1];[.$A277];[$JSON.$T$1];[.$B277];[$JSON.$U$1])" office:value-type="string" office:string-value="{&quot;id&quot;:&quot;3-48&quot;,&quot;name&quot;:&quot;マシュー・カルブレイス・ペリー&quot;,&quot;displayName&quot;:&quot;マシュー・カルブレイス・ペリー&quot;,&quot;kana&quot;:&quot;ましゅーかるぶれいすぺり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rarity&quot;:2,&quot;type&quot;:1,&quot;level&quot;:4,&quot;color&quot;:16,&quot;term&quot;:1,&quot;trait&quot;:0,&quot;power&quot;:3500,&quot;legacy&quot;:0,&quot;anyNumCopies&quot;:false,&quot;orderTable&quot;:276,&quot;orderDeck&quot;:178}," calcext:value-type="string">
            <text:p>{"id":"3-48","name":"マシュー・カルブレイス・ペリー","displayName":"マシュー・カルブレイス・ペリー","kana":"ましゅーかるぶれいすぺり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rarity":2,"type":1,"level":4,"color":16,"term":1,"trait":0,"power":3500,"legacy":0,"anyNumCopies":false,"orderTable":276,"orderDeck":178},</text:p>
          </table:table-cell>
          <table:table-cell table:number-columns-repeated="16356"/>
        </table:table-row>
        <table:table-row table:style-name="ro2">
          <table:table-cell table:style-name="ce11" office:value-type="float" office:value="277" calcext:value-type="float">
            <text:p>277</text:p>
          </table:table-cell>
          <table:table-cell table:style-name="ce11" office:value-type="float" office:value="289" calcext:value-type="float">
            <text:p>289</text:p>
          </table:table-cell>
          <table:table-cell table:style-name="ce21" office:value-type="string" calcext:value-type="string">
            <text:p>3-49</text:p>
          </table:table-cell>
          <table:table-cell table:style-name="ce21" office:value-type="float" office:value="49" calcext:value-type="float">
            <text:p>49</text:p>
          </table:table-cell>
          <table:table-cell table:style-name="ce11" office:value-type="string" calcext:value-type="string">
            <text:p>タウンゼント・ハリス</text:p>
          </table:table-cell>
          <table:table-cell table:style-name="ce11" table:formula="of:=[.E278]" office:value-type="string" office:string-value="タウンゼント・ハリス" calcext:value-type="string">
            <text:p>タウンゼント・ハリス</text:p>
          </table:table-cell>
          <table:table-cell table:style-name="ce11" office:value-type="string" calcext:value-type="string">
            <text:p>たうんぜんとはりす</text:p>
          </table:table-cell>
          <table:table-cell table:style-name="ce11" office:value-type="string" calcext:value-type="string">
            <text:p>第３弾ブースターパック</text:p>
          </table:table-cell>
          <table:table-cell table:style-name="ce11" table:formula="of:=VLOOKUP([.H278];[$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7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8];[$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8];[$色番号.$A$1:$色番号.$B$10];2;0)" office:value-type="float" office:value="16" calcext:value-type="float">
            <text:p>16</text:p>
          </table:table-cell>
          <table:table-cell table:style-name="ce11" office:value-type="float" office:value="8" calcext:value-type="float">
            <text:p>8</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278];[$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278];[$特性番号.$A$1:$特性番号.$B$8];2;0);0)" office:value-type="float" office:value="0" calcext:value-type="float">
            <text:p>0</text:p>
          </table:table-cell>
          <table:table-cell table:style-name="ce11"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table:style-name="ce11" office:value-type="float" office:value="7500" calcext:value-type="float">
            <text:p>7500</text:p>
          </table:table-cell>
          <table:table-cell table:style-name="ce25" table:formula="of:=NA()" office:value-type="string" office:string-value="" calcext:value-type="error">
            <text:p>#N/A</text:p>
          </table:table-cell>
          <table:table-cell table:style-name="ce11" table:formula="of:=IFERROR(VLOOKUP([.$X27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49.png</text:p>
          </table:table-cell>
          <table:table-cell table:style-name="ce11" table:formula="of:=CONCATENATE([$JSON.$A$1];[.$C278];[$JSON.$B$1];[.$E278];[$JSON.$C$1];[.F278];[$JSON.$D$1];[.$G278];[$JSON.$E$1];IF(ISNA([.$T278]);&quot;null&quot;;&quot;&quot;&quot;&quot;&amp;[.$T278]&amp;&quot;&quot;&quot;&quot;);[$JSON.$F$1];[.$V278];[$JSON.$G$1];IF(ISNA([.$X278]);&quot;null&quot;;&quot;&quot;&quot;&quot;&amp;[.$X278]&amp;&quot;&quot;&quot;&quot;);[$JSON.$H$1];[.$AA278];[$JSON.$I$1];[.$I278];[$JSON.$J$1];[.K278];[$JSON.$K$1];[.$M278];[$JSON.$L$1];[.$P278];[$JSON.$M$1];[.$O278];[$JSON.$N$1];[.$S278];[$JSON.$O$1];[.$U278];[$JSON.$P$1];IF(ISNA([.$W278]);&quot;null&quot;;[.$W278]);[$JSON.$Q$1];[.$Y278];[$JSON.$R$1];IF([.$Z278];&quot;true&quot;;&quot;false&quot;);[$JSON.$S$1];[.$A278];[$JSON.$T$1];[.$B278];[$JSON.$U$1])" office:value-type="string" office:string-value="{&quot;id&quot;:&quot;3-49&quot;,&quot;name&quot;:&quot;タウンゼント・ハリス&quot;,&quot;displayName&quot;:&quot;タウンゼント・ハリス&quot;,&quot;kana&quot;:&quot;たうんぜんとはりす&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rarity&quot;:1,&quot;type&quot;:1,&quot;level&quot;:8,&quot;color&quot;:16,&quot;term&quot;:1,&quot;trait&quot;:0,&quot;power&quot;:7500,&quot;legacy&quot;:0,&quot;anyNumCopies&quot;:false,&quot;orderTable&quot;:277,&quot;orderDeck&quot;:289}," calcext:value-type="string">
            <text:p>{"id":"3-49","name":"タウンゼント・ハリス","displayName":"タウンゼント・ハリス","kana":"たうんぜんとはりす","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rarity":1,"type":1,"level":8,"color":16,"term":1,"trait":0,"power":7500,"legacy":0,"anyNumCopies":false,"orderTable":277,"orderDeck":289},</text:p>
          </table:table-cell>
          <table:table-cell table:number-columns-repeated="16356"/>
        </table:table-row>
        <table:table-row table:style-name="ro2">
          <table:table-cell table:style-name="ce11" office:value-type="float" office:value="278" calcext:value-type="float">
            <text:p>278</text:p>
          </table:table-cell>
          <table:table-cell table:style-name="ce11" office:value-type="float" office:value="132" calcext:value-type="float">
            <text:p>132</text:p>
          </table:table-cell>
          <table:table-cell table:style-name="ce21" office:value-type="string" calcext:value-type="string">
            <text:p>3-50</text:p>
          </table:table-cell>
          <table:table-cell table:style-name="ce21" office:value-type="float" office:value="50" calcext:value-type="float">
            <text:p>50</text:p>
          </table:table-cell>
          <table:table-cell table:style-name="ce11" office:value-type="string" calcext:value-type="string">
            <text:p>勝海舟</text:p>
          </table:table-cell>
          <table:table-cell table:style-name="ce11" table:formula="of:=[.E279]" office:value-type="string" office:string-value="勝海舟" calcext:value-type="string">
            <text:p>勝海舟</text:p>
          </table:table-cell>
          <table:table-cell table:style-name="ce11" office:value-type="string" calcext:value-type="string">
            <text:p>かつかいしゅう</text:p>
          </table:table-cell>
          <table:table-cell table:style-name="ce11" office:value-type="string" calcext:value-type="string">
            <text:p>第３弾ブースターパック</text:p>
          </table:table-cell>
          <table:table-cell table:style-name="ce11" table:formula="of:=VLOOKUP([.H279];[$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7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279];[$種類番号.$A$1:$種類番号.$B$4];2;0)" office:value-type="float" office:value="1" calcext:value-type="float">
            <text:p>1</text:p>
          </table:table-cell>
          <table:table-cell table:style-name="ce11" office:value-type="string" calcext:value-type="string">
            <text:p>紫</text:p>
          </table:table-cell>
          <table:table-cell table:style-name="ce11" table:formula="of:=VLOOKUP([.N27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7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79];[$特性番号.$A$1:$特性番号.$B$8];2;0);0)" office:value-type="float" office:value="0" calcext:value-type="float">
            <text:p>0</text:p>
          </table:table-cell>
          <table:table-cell table:style-name="ce11"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table:style-name="ce11" office:value-type="float" office:value="2000" calcext:value-type="float">
            <text:p>2000</text:p>
          </table:table-cell>
          <table:table-cell table:style-name="ce25" office:value-type="string" calcext:value-type="string">
            <text:p>魔力化</text:p>
          </table:table-cell>
          <table:table-cell table:style-name="ce11" table:formula="of:=IFERROR(VLOOKUP([.$X27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0.png</text:p>
          </table:table-cell>
          <table:table-cell table:style-name="ce11" table:formula="of:=CONCATENATE([$JSON.$A$1];[.$C279];[$JSON.$B$1];[.$E279];[$JSON.$C$1];[.F279];[$JSON.$D$1];[.$G279];[$JSON.$E$1];IF(ISNA([.$T279]);&quot;null&quot;;&quot;&quot;&quot;&quot;&amp;[.$T279]&amp;&quot;&quot;&quot;&quot;);[$JSON.$F$1];[.$V279];[$JSON.$G$1];IF(ISNA([.$X279]);&quot;null&quot;;&quot;&quot;&quot;&quot;&amp;[.$X279]&amp;&quot;&quot;&quot;&quot;);[$JSON.$H$1];[.$AA279];[$JSON.$I$1];[.$I279];[$JSON.$J$1];[.K279];[$JSON.$K$1];[.$M279];[$JSON.$L$1];[.$P279];[$JSON.$M$1];[.$O279];[$JSON.$N$1];[.$S279];[$JSON.$O$1];[.$U279];[$JSON.$P$1];IF(ISNA([.$W279]);&quot;null&quot;;[.$W279]);[$JSON.$Q$1];[.$Y279];[$JSON.$R$1];IF([.$Z279];&quot;true&quot;;&quot;false&quot;);[$JSON.$S$1];[.$A279];[$JSON.$T$1];[.$B279];[$JSON.$U$1])" office:value-type="string" office:string-value="{&quot;id&quot;:&quot;3-50&quot;,&quot;name&quot;:&quot;勝海舟&quot;,&quot;displayName&quot;:&quot;勝海舟&quot;,&quot;kana&quot;:&quot;かつかいしゅう&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rarity&quot;:1,&quot;type&quot;:1,&quot;level&quot;:3,&quot;color&quot;:16,&quot;term&quot;:0,&quot;trait&quot;:0,&quot;power&quot;:2000,&quot;legacy&quot;:1,&quot;anyNumCopies&quot;:false,&quot;orderTable&quot;:278,&quot;orderDeck&quot;:132}," calcext:value-type="string">
            <text:p>{"id":"3-50","name":"勝海舟","displayName":"勝海舟","kana":"かつかいしゅう","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rarity":1,"type":1,"level":3,"color":16,"term":0,"trait":0,"power":2000,"legacy":1,"anyNumCopies":false,"orderTable":278,"orderDeck":132},</text:p>
          </table:table-cell>
          <table:table-cell table:number-columns-repeated="16356"/>
        </table:table-row>
        <table:table-row table:style-name="ro2">
          <table:table-cell table:style-name="ce11" office:value-type="float" office:value="279" calcext:value-type="float">
            <text:p>279</text:p>
          </table:table-cell>
          <table:table-cell table:style-name="ce11" office:value-type="float" office:value="317" calcext:value-type="float">
            <text:p>317</text:p>
          </table:table-cell>
          <table:table-cell table:style-name="ce21" office:value-type="string" calcext:value-type="string">
            <text:p>3-51</text:p>
          </table:table-cell>
          <table:table-cell table:style-name="ce21" office:value-type="float" office:value="51" calcext:value-type="float">
            <text:p>51</text:p>
          </table:table-cell>
          <table:table-cell table:style-name="ce11" office:value-type="string" calcext:value-type="string">
            <text:p>炎上がる天守閣</text:p>
          </table:table-cell>
          <table:table-cell table:style-name="ce11" table:formula="of:=[.E280]" office:value-type="string" office:string-value="炎上がる天守閣" calcext:value-type="string">
            <text:p>炎上がる天守閣</text:p>
          </table:table-cell>
          <table:table-cell table:style-name="ce11" office:value-type="string" calcext:value-type="string">
            <text:p>ほのおあがるてんしゅかく</text:p>
          </table:table-cell>
          <table:table-cell table:style-name="ce11" office:value-type="string" calcext:value-type="string">
            <text:p>第３弾ブースターパック</text:p>
          </table:table-cell>
          <table:table-cell table:style-name="ce11" table:formula="of:=VLOOKUP([.H280];[$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8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0];[$種類番号.$A$1:$種類番号.$B$4];2;0)" office:value-type="float" office:value="2" calcext:value-type="float">
            <text:p>2</text:p>
          </table:table-cell>
          <table:table-cell table:style-name="ce11" office:value-type="string" calcext:value-type="string">
            <text:p>赤</text:p>
          </table:table-cell>
          <table:table-cell table:style-name="ce11" table:formula="of:=VLOOKUP([.N280];[$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80];[$特性番号.$A$1:$特性番号.$B$8];2;0);0)" office:value-type="float" office:value="0" calcext:value-type="float">
            <text:p>0</text:p>
          </table:table-cell>
          <table:table-cell table:style-name="ce11"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1.png</text:p>
          </table:table-cell>
          <table:table-cell table:style-name="ce11" table:formula="of:=CONCATENATE([$JSON.$A$1];[.$C280];[$JSON.$B$1];[.$E280];[$JSON.$C$1];[.F280];[$JSON.$D$1];[.$G280];[$JSON.$E$1];IF(ISNA([.$T280]);&quot;null&quot;;&quot;&quot;&quot;&quot;&amp;[.$T280]&amp;&quot;&quot;&quot;&quot;);[$JSON.$F$1];[.$V280];[$JSON.$G$1];IF(ISNA([.$X280]);&quot;null&quot;;&quot;&quot;&quot;&quot;&amp;[.$X280]&amp;&quot;&quot;&quot;&quot;);[$JSON.$H$1];[.$AA280];[$JSON.$I$1];[.$I280];[$JSON.$J$1];[.K280];[$JSON.$K$1];[.$M280];[$JSON.$L$1];[.$P280];[$JSON.$M$1];[.$O280];[$JSON.$N$1];[.$S280];[$JSON.$O$1];[.$U280];[$JSON.$P$1];IF(ISNA([.$W280]);&quot;null&quot;;[.$W280]);[$JSON.$Q$1];[.$Y280];[$JSON.$R$1];IF([.$Z280];&quot;true&quot;;&quot;false&quot;);[$JSON.$S$1];[.$A280];[$JSON.$T$1];[.$B280];[$JSON.$U$1])" office:value-type="string" office:string-value="{&quot;id&quot;:&quot;3-51&quot;,&quot;name&quot;:&quot;炎上がる天守閣&quot;,&quot;displayName&quot;:&quot;炎上がる天守閣&quot;,&quot;kana&quot;:&quot;ほのおあがるてんしゅかく&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rarity&quot;:1,&quot;type&quot;:2,&quot;level&quot;:3,&quot;color&quot;:1,&quot;term&quot;:0,&quot;trait&quot;:0,&quot;power&quot;:null,&quot;legacy&quot;:0,&quot;anyNumCopies&quot;:false,&quot;orderTable&quot;:279,&quot;orderDeck&quot;:317}," calcext:value-type="string">
            <text:p>{"id":"3-51","name":"炎上がる天守閣","displayName":"炎上がる天守閣","kana":"ほのおあがるてんしゅかく","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rarity":1,"type":2,"level":3,"color":1,"term":0,"trait":0,"power":null,"legacy":0,"anyNumCopies":false,"orderTable":279,"orderDeck":317},</text:p>
          </table:table-cell>
          <table:table-cell table:number-columns-repeated="16356"/>
        </table:table-row>
        <table:table-row table:style-name="ro2">
          <table:table-cell table:style-name="ce11" office:value-type="float" office:value="280" calcext:value-type="float">
            <text:p>280</text:p>
          </table:table-cell>
          <table:table-cell table:style-name="ce11" office:value-type="float" office:value="299" calcext:value-type="float">
            <text:p>299</text:p>
          </table:table-cell>
          <table:table-cell table:style-name="ce21" office:value-type="string" calcext:value-type="string">
            <text:p>3-52</text:p>
          </table:table-cell>
          <table:table-cell table:style-name="ce21" office:value-type="float" office:value="52" calcext:value-type="float">
            <text:p>52</text:p>
          </table:table-cell>
          <table:table-cell table:style-name="ce11" office:value-type="string" calcext:value-type="string">
            <text:p>天下分け目の主戦場</text:p>
          </table:table-cell>
          <table:table-cell table:style-name="ce11" table:formula="of:=[.E281]" office:value-type="string" office:string-value="天下分け目の主戦場" calcext:value-type="string">
            <text:p>天下分け目の主戦場</text:p>
          </table:table-cell>
          <table:table-cell table:style-name="ce11" office:value-type="string" calcext:value-type="string">
            <text:p>てんかわけめのしゅせんじょう</text:p>
          </table:table-cell>
          <table:table-cell table:style-name="ce11" office:value-type="string" calcext:value-type="string">
            <text:p>第３弾ブースターパック</text:p>
          </table:table-cell>
          <table:table-cell table:style-name="ce11" table:formula="of:=VLOOKUP([.H281];[$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8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1];[$種類番号.$A$1:$種類番号.$B$4];2;0)" office:value-type="float" office:value="2" calcext:value-type="float">
            <text:p>2</text:p>
          </table:table-cell>
          <table:table-cell table:style-name="ce11" office:value-type="string" calcext:value-type="string">
            <text:p>赤</text:p>
          </table:table-cell>
          <table:table-cell table:style-name="ce11" table:formula="of:=VLOOKUP([.N281];[$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81];[$特性番号.$A$1:$特性番号.$B$8];2;0);0)" office:value-type="float" office:value="0" calcext:value-type="float">
            <text:p>0</text:p>
          </table:table-cell>
          <table:table-cell table:style-name="ce11"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2.png</text:p>
          </table:table-cell>
          <table:table-cell table:style-name="ce11" table:formula="of:=CONCATENATE([$JSON.$A$1];[.$C281];[$JSON.$B$1];[.$E281];[$JSON.$C$1];[.F281];[$JSON.$D$1];[.$G281];[$JSON.$E$1];IF(ISNA([.$T281]);&quot;null&quot;;&quot;&quot;&quot;&quot;&amp;[.$T281]&amp;&quot;&quot;&quot;&quot;);[$JSON.$F$1];[.$V281];[$JSON.$G$1];IF(ISNA([.$X281]);&quot;null&quot;;&quot;&quot;&quot;&quot;&amp;[.$X281]&amp;&quot;&quot;&quot;&quot;);[$JSON.$H$1];[.$AA281];[$JSON.$I$1];[.$I281];[$JSON.$J$1];[.K281];[$JSON.$K$1];[.$M281];[$JSON.$L$1];[.$P281];[$JSON.$M$1];[.$O281];[$JSON.$N$1];[.$S281];[$JSON.$O$1];[.$U281];[$JSON.$P$1];IF(ISNA([.$W281]);&quot;null&quot;;[.$W281]);[$JSON.$Q$1];[.$Y281];[$JSON.$R$1];IF([.$Z281];&quot;true&quot;;&quot;false&quot;);[$JSON.$S$1];[.$A281];[$JSON.$T$1];[.$B281];[$JSON.$U$1])" office:value-type="string" office:string-value="{&quot;id&quot;:&quot;3-52&quot;,&quot;name&quot;:&quot;天下分け目の主戦場&quot;,&quot;displayName&quot;:&quot;天下分け目の主戦場&quot;,&quot;kana&quot;:&quot;てんかわけめのしゅせんじょう&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rarity&quot;:1,&quot;type&quot;:2,&quot;level&quot;:1,&quot;color&quot;:1,&quot;term&quot;:0,&quot;trait&quot;:0,&quot;power&quot;:null,&quot;legacy&quot;:0,&quot;anyNumCopies&quot;:false,&quot;orderTable&quot;:280,&quot;orderDeck&quot;:299}," calcext:value-type="string">
            <text:p>{"id":"3-52","name":"天下分け目の主戦場","displayName":"天下分け目の主戦場","kana":"てんかわけめのしゅせんじょう","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rarity":1,"type":2,"level":1,"color":1,"term":0,"trait":0,"power":null,"legacy":0,"anyNumCopies":false,"orderTable":280,"orderDeck":299},</text:p>
          </table:table-cell>
          <table:table-cell table:number-columns-repeated="16356"/>
        </table:table-row>
        <table:table-row table:style-name="ro2">
          <table:table-cell table:style-name="ce11" office:value-type="float" office:value="281" calcext:value-type="float">
            <text:p>281</text:p>
          </table:table-cell>
          <table:table-cell table:style-name="ce11" office:value-type="float" office:value="335" calcext:value-type="float">
            <text:p>335</text:p>
          </table:table-cell>
          <table:table-cell table:style-name="ce21" office:value-type="string" calcext:value-type="string">
            <text:p>3-53</text:p>
          </table:table-cell>
          <table:table-cell table:style-name="ce21" office:value-type="float" office:value="53" calcext:value-type="float">
            <text:p>53</text:p>
          </table:table-cell>
          <table:table-cell table:style-name="ce11" office:value-type="string" calcext:value-type="string">
            <text:p>永遠の帝都</text:p>
          </table:table-cell>
          <table:table-cell table:style-name="ce11" table:formula="of:=[.E282]" office:value-type="string" office:string-value="永遠の帝都" calcext:value-type="string">
            <text:p>永遠の帝都</text:p>
          </table:table-cell>
          <table:table-cell table:style-name="ce11" office:value-type="string" calcext:value-type="string">
            <text:p>えいえんのていと</text:p>
          </table:table-cell>
          <table:table-cell table:style-name="ce11" office:value-type="string" calcext:value-type="string">
            <text:p>第３弾ブースターパック</text:p>
          </table:table-cell>
          <table:table-cell table:style-name="ce11" table:formula="of:=VLOOKUP([.H282];[$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8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2];[$種類番号.$A$1:$種類番号.$B$4];2;0)" office:value-type="float" office:value="2" calcext:value-type="float">
            <text:p>2</text:p>
          </table:table-cell>
          <table:table-cell table:style-name="ce11" office:value-type="string" calcext:value-type="string">
            <text:p>青</text:p>
          </table:table-cell>
          <table:table-cell table:style-name="ce11" table:formula="of:=VLOOKUP([.N282];[$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82];[$特性番号.$A$1:$特性番号.$B$8];2;0);0)" office:value-type="float" office:value="0" calcext:value-type="float">
            <text:p>0</text:p>
          </table:table-cell>
          <table:table-cell table:style-name="ce11"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3.png</text:p>
          </table:table-cell>
          <table:table-cell table:style-name="ce11" table:formula="of:=CONCATENATE([$JSON.$A$1];[.$C282];[$JSON.$B$1];[.$E282];[$JSON.$C$1];[.F282];[$JSON.$D$1];[.$G282];[$JSON.$E$1];IF(ISNA([.$T282]);&quot;null&quot;;&quot;&quot;&quot;&quot;&amp;[.$T282]&amp;&quot;&quot;&quot;&quot;);[$JSON.$F$1];[.$V282];[$JSON.$G$1];IF(ISNA([.$X282]);&quot;null&quot;;&quot;&quot;&quot;&quot;&amp;[.$X282]&amp;&quot;&quot;&quot;&quot;);[$JSON.$H$1];[.$AA282];[$JSON.$I$1];[.$I282];[$JSON.$J$1];[.K282];[$JSON.$K$1];[.$M282];[$JSON.$L$1];[.$P282];[$JSON.$M$1];[.$O282];[$JSON.$N$1];[.$S282];[$JSON.$O$1];[.$U282];[$JSON.$P$1];IF(ISNA([.$W282]);&quot;null&quot;;[.$W282]);[$JSON.$Q$1];[.$Y282];[$JSON.$R$1];IF([.$Z282];&quot;true&quot;;&quot;false&quot;);[$JSON.$S$1];[.$A282];[$JSON.$T$1];[.$B282];[$JSON.$U$1])" office:value-type="string" office:string-value="{&quot;id&quot;:&quot;3-53&quot;,&quot;name&quot;:&quot;永遠の帝都&quot;,&quot;displayName&quot;:&quot;永遠の帝都&quot;,&quot;kana&quot;:&quot;えいえんのていと&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rarity&quot;:1,&quot;type&quot;:2,&quot;level&quot;:4,&quot;color&quot;:2,&quot;term&quot;:0,&quot;trait&quot;:0,&quot;power&quot;:null,&quot;legacy&quot;:0,&quot;anyNumCopies&quot;:false,&quot;orderTable&quot;:281,&quot;orderDeck&quot;:335}," calcext:value-type="string">
            <text:p>{"id":"3-53","name":"永遠の帝都","displayName":"永遠の帝都","kana":"えいえんのていと","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rarity":1,"type":2,"level":4,"color":2,"term":0,"trait":0,"power":null,"legacy":0,"anyNumCopies":false,"orderTable":281,"orderDeck":335},</text:p>
          </table:table-cell>
          <table:table-cell table:number-columns-repeated="16356"/>
        </table:table-row>
        <table:table-row table:style-name="ro2">
          <table:table-cell table:style-name="ce11" office:value-type="float" office:value="282" calcext:value-type="float">
            <text:p>282</text:p>
          </table:table-cell>
          <table:table-cell table:style-name="ce11" office:value-type="float" office:value="342" calcext:value-type="float">
            <text:p>342</text:p>
          </table:table-cell>
          <table:table-cell table:style-name="ce21" office:value-type="string" calcext:value-type="string">
            <text:p>3-54</text:p>
          </table:table-cell>
          <table:table-cell table:style-name="ce21" office:value-type="float" office:value="54" calcext:value-type="float">
            <text:p>54</text:p>
          </table:table-cell>
          <table:table-cell table:style-name="ce11" office:value-type="string" calcext:value-type="string">
            <text:p>暴風岬</text:p>
          </table:table-cell>
          <table:table-cell table:style-name="ce11" table:formula="of:=[.E283]" office:value-type="string" office:string-value="暴風岬" calcext:value-type="string">
            <text:p>暴風岬</text:p>
          </table:table-cell>
          <table:table-cell table:style-name="ce11" office:value-type="string" calcext:value-type="string">
            <text:p>ぼうふうみさき</text:p>
          </table:table-cell>
          <table:table-cell table:style-name="ce11" office:value-type="string" calcext:value-type="string">
            <text:p>第３弾ブースターパック</text:p>
          </table:table-cell>
          <table:table-cell table:style-name="ce11" table:formula="of:=VLOOKUP([.H283];[$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8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3];[$種類番号.$A$1:$種類番号.$B$4];2;0)" office:value-type="float" office:value="2" calcext:value-type="float">
            <text:p>2</text:p>
          </table:table-cell>
          <table:table-cell table:style-name="ce11" office:value-type="string" calcext:value-type="string">
            <text:p>青</text:p>
          </table:table-cell>
          <table:table-cell table:style-name="ce11" table:formula="of:=VLOOKUP([.N283];[$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83];[$特性番号.$A$1:$特性番号.$B$8];2;0);0)" office:value-type="float" office:value="0" calcext:value-type="float">
            <text:p>0</text:p>
          </table:table-cell>
          <table:table-cell table:style-name="ce11" office:value-type="string" calcext:value-type="string">
            <text:p>自分のエンドフェイズが開始したとき、自分の戦場のイジン1体を手札に戻して発動できる。1ドロー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8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4.png</text:p>
          </table:table-cell>
          <table:table-cell table:style-name="ce11" table:formula="of:=CONCATENATE([$JSON.$A$1];[.$C283];[$JSON.$B$1];[.$E283];[$JSON.$C$1];[.F283];[$JSON.$D$1];[.$G283];[$JSON.$E$1];IF(ISNA([.$T283]);&quot;null&quot;;&quot;&quot;&quot;&quot;&amp;[.$T283]&amp;&quot;&quot;&quot;&quot;);[$JSON.$F$1];[.$V283];[$JSON.$G$1];IF(ISNA([.$X283]);&quot;null&quot;;&quot;&quot;&quot;&quot;&amp;[.$X283]&amp;&quot;&quot;&quot;&quot;);[$JSON.$H$1];[.$AA283];[$JSON.$I$1];[.$I283];[$JSON.$J$1];[.K283];[$JSON.$K$1];[.$M283];[$JSON.$L$1];[.$P283];[$JSON.$M$1];[.$O283];[$JSON.$N$1];[.$S283];[$JSON.$O$1];[.$U283];[$JSON.$P$1];IF(ISNA([.$W283]);&quot;null&quot;;[.$W283]);[$JSON.$Q$1];[.$Y283];[$JSON.$R$1];IF([.$Z283];&quot;true&quot;;&quot;false&quot;);[$JSON.$S$1];[.$A283];[$JSON.$T$1];[.$B283];[$JSON.$U$1])" office:value-type="string" office:string-value="{&quot;id&quot;:&quot;3-54&quot;,&quot;name&quot;:&quot;暴風岬&quot;,&quot;displayName&quot;:&quot;暴風岬&quot;,&quot;kana&quot;:&quot;ぼうふうみさき&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rarity&quot;:1,&quot;type&quot;:2,&quot;level&quot;:5,&quot;color&quot;:2,&quot;term&quot;:0,&quot;trait&quot;:0,&quot;power&quot;:null,&quot;legacy&quot;:5,&quot;anyNumCopies&quot;:false,&quot;orderTable&quot;:282,&quot;orderDeck&quot;:342}," calcext:value-type="string">
            <text:p>{"id":"3-54","name":"暴風岬","displayName":"暴風岬","kana":"ぼうふうみさき","traitText":null,"ruleText":"自分のエンドフェイズが開始したとき、自分の戦場のイジン1体を手札に戻して発動できる。1ドローする。","legacyText":"手札に戻す","imageUrl":"https://one-draw.jp/ijinden/cardlist/003/card/03_054.png","expansion":35,"rarity":1,"type":2,"level":5,"color":2,"term":0,"trait":0,"power":null,"legacy":5,"anyNumCopies":false,"orderTable":282,"orderDeck":342},</text:p>
          </table:table-cell>
          <table:table-cell table:number-columns-repeated="16356"/>
        </table:table-row>
        <table:table-row table:style-name="ro2">
          <table:table-cell table:style-name="ce11" office:value-type="float" office:value="283" calcext:value-type="float">
            <text:p>283</text:p>
          </table:table-cell>
          <table:table-cell table:style-name="ce11" office:value-type="float" office:value="323" calcext:value-type="float">
            <text:p>323</text:p>
          </table:table-cell>
          <table:table-cell table:style-name="ce21" office:value-type="string" calcext:value-type="string">
            <text:p>3-55</text:p>
          </table:table-cell>
          <table:table-cell table:style-name="ce21" office:value-type="float" office:value="55" calcext:value-type="float">
            <text:p>55</text:p>
          </table:table-cell>
          <table:table-cell table:style-name="ce11" office:value-type="string" calcext:value-type="string">
            <text:p>商館並ぶ人工島</text:p>
          </table:table-cell>
          <table:table-cell table:style-name="ce11" table:formula="of:=[.E284]" office:value-type="string" office:string-value="商館並ぶ人工島" calcext:value-type="string">
            <text:p>商館並ぶ人工島</text:p>
          </table:table-cell>
          <table:table-cell table:style-name="ce11" office:value-type="string" calcext:value-type="string">
            <text:p>しょうかんならぶじんこうとう</text:p>
          </table:table-cell>
          <table:table-cell table:style-name="ce11" office:value-type="string" calcext:value-type="string">
            <text:p>第３弾ブースターパック</text:p>
          </table:table-cell>
          <table:table-cell table:style-name="ce11" table:formula="of:=VLOOKUP([.H284];[$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8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4];[$種類番号.$A$1:$種類番号.$B$4];2;0)" office:value-type="float" office:value="2" calcext:value-type="float">
            <text:p>2</text:p>
          </table:table-cell>
          <table:table-cell table:style-name="ce11" office:value-type="string" calcext:value-type="string">
            <text:p>緑</text:p>
          </table:table-cell>
          <table:table-cell table:style-name="ce11" table:formula="of:=VLOOKUP([.N284];[$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84];[$特性番号.$A$1:$特性番号.$B$8];2;0);0)" office:value-type="float" office:value="0" calcext:value-type="float">
            <text:p>0</text:p>
          </table:table-cell>
          <table:table-cell table:style-name="ce11"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5.png</text:p>
          </table:table-cell>
          <table:table-cell table:style-name="ce11" table:formula="of:=CONCATENATE([$JSON.$A$1];[.$C284];[$JSON.$B$1];[.$E284];[$JSON.$C$1];[.F284];[$JSON.$D$1];[.$G284];[$JSON.$E$1];IF(ISNA([.$T284]);&quot;null&quot;;&quot;&quot;&quot;&quot;&amp;[.$T284]&amp;&quot;&quot;&quot;&quot;);[$JSON.$F$1];[.$V284];[$JSON.$G$1];IF(ISNA([.$X284]);&quot;null&quot;;&quot;&quot;&quot;&quot;&amp;[.$X284]&amp;&quot;&quot;&quot;&quot;);[$JSON.$H$1];[.$AA284];[$JSON.$I$1];[.$I284];[$JSON.$J$1];[.K284];[$JSON.$K$1];[.$M284];[$JSON.$L$1];[.$P284];[$JSON.$M$1];[.$O284];[$JSON.$N$1];[.$S284];[$JSON.$O$1];[.$U284];[$JSON.$P$1];IF(ISNA([.$W284]);&quot;null&quot;;[.$W284]);[$JSON.$Q$1];[.$Y284];[$JSON.$R$1];IF([.$Z284];&quot;true&quot;;&quot;false&quot;);[$JSON.$S$1];[.$A284];[$JSON.$T$1];[.$B284];[$JSON.$U$1])" office:value-type="string" office:string-value="{&quot;id&quot;:&quot;3-55&quot;,&quot;name&quot;:&quot;商館並ぶ人工島&quot;,&quot;displayName&quot;:&quot;商館並ぶ人工島&quot;,&quot;kana&quot;:&quot;しょうかんならぶじんこうとう&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rarity&quot;:1,&quot;type&quot;:2,&quot;level&quot;:3,&quot;color&quot;:4,&quot;term&quot;:0,&quot;trait&quot;:0,&quot;power&quot;:null,&quot;legacy&quot;:0,&quot;anyNumCopies&quot;:false,&quot;orderTable&quot;:283,&quot;orderDeck&quot;:323}," calcext:value-type="string">
            <text:p>{"id":"3-55","name":"商館並ぶ人工島","displayName":"商館並ぶ人工島","kana":"しょうかんならぶじんこうとう","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rarity":1,"type":2,"level":3,"color":4,"term":0,"trait":0,"power":null,"legacy":0,"anyNumCopies":false,"orderTable":283,"orderDeck":323},</text:p>
          </table:table-cell>
          <table:table-cell table:number-columns-repeated="16356"/>
        </table:table-row>
        <table:table-row table:style-name="ro2">
          <table:table-cell table:style-name="ce11" office:value-type="float" office:value="284" calcext:value-type="float">
            <text:p>284</text:p>
          </table:table-cell>
          <table:table-cell table:style-name="ce11" office:value-type="float" office:value="344" calcext:value-type="float">
            <text:p>344</text:p>
          </table:table-cell>
          <table:table-cell table:style-name="ce21" office:value-type="string" calcext:value-type="string">
            <text:p>3-56</text:p>
          </table:table-cell>
          <table:table-cell table:style-name="ce21" office:value-type="float" office:value="56" calcext:value-type="float">
            <text:p>56</text:p>
          </table:table-cell>
          <table:table-cell table:style-name="ce11" office:value-type="string" calcext:value-type="string">
            <text:p>志士の藩校</text:p>
          </table:table-cell>
          <table:table-cell table:style-name="ce11" table:formula="of:=[.E285]" office:value-type="string" office:string-value="志士の藩校" calcext:value-type="string">
            <text:p>志士の藩校</text:p>
          </table:table-cell>
          <table:table-cell table:style-name="ce11" office:value-type="string" calcext:value-type="string">
            <text:p>ししのはんこう</text:p>
          </table:table-cell>
          <table:table-cell table:style-name="ce11" office:value-type="string" calcext:value-type="string">
            <text:p>第３弾ブースターパック</text:p>
          </table:table-cell>
          <table:table-cell table:style-name="ce11" table:formula="of:=VLOOKUP([.H285];[$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8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5];[$種類番号.$A$1:$種類番号.$B$4];2;0)" office:value-type="float" office:value="2" calcext:value-type="float">
            <text:p>2</text:p>
          </table:table-cell>
          <table:table-cell table:style-name="ce11" office:value-type="string" calcext:value-type="string">
            <text:p>緑</text:p>
          </table:table-cell>
          <table:table-cell table:style-name="ce11" table:formula="of:=VLOOKUP([.N285];[$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285];[$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285];[$特性番号.$A$1:$特性番号.$B$8];2;0);0)" office:value-type="float" office:value="0" calcext:value-type="float">
            <text:p>0</text:p>
          </table:table-cell>
          <table:table-cell table:style-name="ce11"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style-name="ce11" table:formula="of:=NA()" office:value-type="string" office:string-value="" calcext:value-type="error">
            <text:p>#N/A</text:p>
          </table:table-cell>
          <table:table-cell table:style-name="ce25" office:value-type="string" calcext:value-type="string">
            <text:p>木霊</text:p>
          </table:table-cell>
          <table:table-cell table:style-name="ce11" table:formula="of:=IFERROR(VLOOKUP([.$X285];[$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6.png</text:p>
          </table:table-cell>
          <table:table-cell table:style-name="ce11" table:formula="of:=CONCATENATE([$JSON.$A$1];[.$C285];[$JSON.$B$1];[.$E285];[$JSON.$C$1];[.F285];[$JSON.$D$1];[.$G285];[$JSON.$E$1];IF(ISNA([.$T285]);&quot;null&quot;;&quot;&quot;&quot;&quot;&amp;[.$T285]&amp;&quot;&quot;&quot;&quot;);[$JSON.$F$1];[.$V285];[$JSON.$G$1];IF(ISNA([.$X285]);&quot;null&quot;;&quot;&quot;&quot;&quot;&amp;[.$X285]&amp;&quot;&quot;&quot;&quot;);[$JSON.$H$1];[.$AA285];[$JSON.$I$1];[.$I285];[$JSON.$J$1];[.K285];[$JSON.$K$1];[.$M285];[$JSON.$L$1];[.$P285];[$JSON.$M$1];[.$O285];[$JSON.$N$1];[.$S285];[$JSON.$O$1];[.$U285];[$JSON.$P$1];IF(ISNA([.$W285]);&quot;null&quot;;[.$W285]);[$JSON.$Q$1];[.$Y285];[$JSON.$R$1];IF([.$Z285];&quot;true&quot;;&quot;false&quot;);[$JSON.$S$1];[.$A285];[$JSON.$T$1];[.$B285];[$JSON.$U$1])" office:value-type="string" office:string-value="{&quot;id&quot;:&quot;3-56&quot;,&quot;name&quot;:&quot;志士の藩校&quot;,&quot;displayName&quot;:&quot;志士の藩校&quot;,&quot;kana&quot;:&quot;ししのはんこう&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rarity&quot;:1,&quot;type&quot;:2,&quot;level&quot;:5,&quot;color&quot;:4,&quot;term&quot;:2,&quot;trait&quot;:0,&quot;power&quot;:null,&quot;legacy&quot;:8,&quot;anyNumCopies&quot;:false,&quot;orderTable&quot;:284,&quot;orderDeck&quot;:344}," calcext:value-type="string">
            <text:p>{"id":"3-56","name":"志士の藩校","displayName":"志士の藩校","kana":"ししのはんこう","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rarity":1,"type":2,"level":5,"color":4,"term":2,"trait":0,"power":null,"legacy":8,"anyNumCopies":false,"orderTable":284,"orderDeck":344},</text:p>
          </table:table-cell>
          <table:table-cell table:number-columns-repeated="16356"/>
        </table:table-row>
        <table:table-row table:style-name="ro2">
          <table:table-cell table:style-name="ce11" office:value-type="float" office:value="285" calcext:value-type="float">
            <text:p>285</text:p>
          </table:table-cell>
          <table:table-cell table:style-name="ce11" office:value-type="float" office:value="337" calcext:value-type="float">
            <text:p>337</text:p>
          </table:table-cell>
          <table:table-cell table:style-name="ce21" office:value-type="string" calcext:value-type="string">
            <text:p>3-57</text:p>
          </table:table-cell>
          <table:table-cell table:style-name="ce21" office:value-type="float" office:value="57" calcext:value-type="float">
            <text:p>57</text:p>
          </table:table-cell>
          <table:table-cell table:style-name="ce11" office:value-type="string" calcext:value-type="string">
            <text:p>風神雷神図</text:p>
          </table:table-cell>
          <table:table-cell table:style-name="ce11" table:formula="of:=[.E286]" office:value-type="string" office:string-value="風神雷神図" calcext:value-type="string">
            <text:p>風神雷神図</text:p>
          </table:table-cell>
          <table:table-cell table:style-name="ce11" office:value-type="string" calcext:value-type="string">
            <text:p>ふうじんらいじんず</text:p>
          </table:table-cell>
          <table:table-cell table:style-name="ce11" office:value-type="string" calcext:value-type="string">
            <text:p>第３弾ブースターパック</text:p>
          </table:table-cell>
          <table:table-cell table:style-name="ce11" table:formula="of:=VLOOKUP([.H286];[$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8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6];[$種類番号.$A$1:$種類番号.$B$4];2;0)" office:value-type="float" office:value="2" calcext:value-type="float">
            <text:p>2</text:p>
          </table:table-cell>
          <table:table-cell table:style-name="ce11" office:value-type="string" calcext:value-type="string">
            <text:p>黄</text:p>
          </table:table-cell>
          <table:table-cell table:style-name="ce11" table:formula="of:=VLOOKUP([.N286];[$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6];[$能力語番号.$A$1:$能力語番号.$B$11];2;0);0)" office:value-type="float" office:value="0" calcext:value-type="float">
            <text:p>0</text:p>
          </table:table-cell>
          <table:table-cell office:value-type="string" calcext:value-type="string">
            <text:p>美術</text:p>
          </table:table-cell>
          <table:table-cell table:style-name="ce11" table:formula="of:=IFERROR(VLOOKUP([.$T286];[$特性番号.$A$1:$特性番号.$B$8];2;0);0)" office:value-type="float" office:value="2" calcext:value-type="float">
            <text:p>2</text:p>
          </table:table-cell>
          <table:table-cell table:style-name="ce11"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286];[$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7.png</text:p>
          </table:table-cell>
          <table:table-cell table:style-name="ce11" table:formula="of:=CONCATENATE([$JSON.$A$1];[.$C286];[$JSON.$B$1];[.$E286];[$JSON.$C$1];[.F286];[$JSON.$D$1];[.$G286];[$JSON.$E$1];IF(ISNA([.$T286]);&quot;null&quot;;&quot;&quot;&quot;&quot;&amp;[.$T286]&amp;&quot;&quot;&quot;&quot;);[$JSON.$F$1];[.$V286];[$JSON.$G$1];IF(ISNA([.$X286]);&quot;null&quot;;&quot;&quot;&quot;&quot;&amp;[.$X286]&amp;&quot;&quot;&quot;&quot;);[$JSON.$H$1];[.$AA286];[$JSON.$I$1];[.$I286];[$JSON.$J$1];[.K286];[$JSON.$K$1];[.$M286];[$JSON.$L$1];[.$P286];[$JSON.$M$1];[.$O286];[$JSON.$N$1];[.$S286];[$JSON.$O$1];[.$U286];[$JSON.$P$1];IF(ISNA([.$W286]);&quot;null&quot;;[.$W286]);[$JSON.$Q$1];[.$Y286];[$JSON.$R$1];IF([.$Z286];&quot;true&quot;;&quot;false&quot;);[$JSON.$S$1];[.$A286];[$JSON.$T$1];[.$B286];[$JSON.$U$1])" office:value-type="string" office:string-value="{&quot;id&quot;:&quot;3-57&quot;,&quot;name&quot;:&quot;風神雷神図&quot;,&quot;displayName&quot;:&quot;風神雷神図&quot;,&quot;kana&quot;:&quot;ふうじんらいじんず&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rarity&quot;:1,&quot;type&quot;:2,&quot;level&quot;:4,&quot;color&quot;:8,&quot;term&quot;:0,&quot;trait&quot;:2,&quot;power&quot;:null,&quot;legacy&quot;:7,&quot;anyNumCopies&quot;:false,&quot;orderTable&quot;:285,&quot;orderDeck&quot;:337}," calcext:value-type="string">
            <text:p>{"id":"3-57","name":"風神雷神図","displayName":"風神雷神図","kana":"ふうじんらいじんず","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rarity":1,"type":2,"level":4,"color":8,"term":0,"trait":2,"power":null,"legacy":7,"anyNumCopies":false,"orderTable":285,"orderDeck":337},</text:p>
          </table:table-cell>
          <table:table-cell table:number-columns-repeated="16356"/>
        </table:table-row>
        <table:table-row table:style-name="ro2">
          <table:table-cell table:style-name="ce11" office:value-type="float" office:value="286" calcext:value-type="float">
            <text:p>286</text:p>
          </table:table-cell>
          <table:table-cell table:style-name="ce11" office:value-type="float" office:value="327" calcext:value-type="float">
            <text:p>327</text:p>
          </table:table-cell>
          <table:table-cell table:style-name="ce21" office:value-type="string" calcext:value-type="string">
            <text:p>3-58</text:p>
          </table:table-cell>
          <table:table-cell table:style-name="ce21" office:value-type="float" office:value="58" calcext:value-type="float">
            <text:p>58</text:p>
          </table:table-cell>
          <table:table-cell table:style-name="ce11" office:value-type="string" calcext:value-type="string">
            <text:p>茅葺き屋根の張出し舞台</text:p>
          </table:table-cell>
          <table:table-cell table:style-name="ce11" table:formula="of:=[.E287]" office:value-type="string" office:string-value="茅葺き屋根の張出し舞台" calcext:value-type="string">
            <text:p>茅葺き屋根の張出し舞台</text:p>
          </table:table-cell>
          <table:table-cell table:style-name="ce11" office:value-type="string" calcext:value-type="string">
            <text:p>かやぶきやねのはりだしぶたい</text:p>
          </table:table-cell>
          <table:table-cell table:style-name="ce11" office:value-type="string" calcext:value-type="string">
            <text:p>第３弾ブースターパック</text:p>
          </table:table-cell>
          <table:table-cell table:style-name="ce11" table:formula="of:=VLOOKUP([.H287];[$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8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7];[$種類番号.$A$1:$種類番号.$B$4];2;0)" office:value-type="float" office:value="2" calcext:value-type="float">
            <text:p>2</text:p>
          </table:table-cell>
          <table:table-cell table:style-name="ce11" office:value-type="string" calcext:value-type="string">
            <text:p>黄</text:p>
          </table:table-cell>
          <table:table-cell table:style-name="ce11" table:formula="of:=VLOOKUP([.N28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87];[$特性番号.$A$1:$特性番号.$B$8];2;0);0)" office:value-type="float" office:value="0" calcext:value-type="float">
            <text:p>0</text:p>
          </table:table-cell>
          <table:table-cell table:style-name="ce11"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287];[$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8.png</text:p>
          </table:table-cell>
          <table:table-cell table:style-name="ce11" table:formula="of:=CONCATENATE([$JSON.$A$1];[.$C287];[$JSON.$B$1];[.$E287];[$JSON.$C$1];[.F287];[$JSON.$D$1];[.$G287];[$JSON.$E$1];IF(ISNA([.$T287]);&quot;null&quot;;&quot;&quot;&quot;&quot;&amp;[.$T287]&amp;&quot;&quot;&quot;&quot;);[$JSON.$F$1];[.$V287];[$JSON.$G$1];IF(ISNA([.$X287]);&quot;null&quot;;&quot;&quot;&quot;&quot;&amp;[.$X287]&amp;&quot;&quot;&quot;&quot;);[$JSON.$H$1];[.$AA287];[$JSON.$I$1];[.$I287];[$JSON.$J$1];[.K287];[$JSON.$K$1];[.$M287];[$JSON.$L$1];[.$P287];[$JSON.$M$1];[.$O287];[$JSON.$N$1];[.$S287];[$JSON.$O$1];[.$U287];[$JSON.$P$1];IF(ISNA([.$W287]);&quot;null&quot;;[.$W287]);[$JSON.$Q$1];[.$Y287];[$JSON.$R$1];IF([.$Z287];&quot;true&quot;;&quot;false&quot;);[$JSON.$S$1];[.$A287];[$JSON.$T$1];[.$B287];[$JSON.$U$1])" office:value-type="string" office:string-value="{&quot;id&quot;:&quot;3-58&quot;,&quot;name&quot;:&quot;茅葺き屋根の張出し舞台&quot;,&quot;displayName&quot;:&quot;茅葺き屋根の張出し舞台&quot;,&quot;kana&quot;:&quot;かやぶきやねのはりだしぶたい&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rarity&quot;:1,&quot;type&quot;:2,&quot;level&quot;:3,&quot;color&quot;:8,&quot;term&quot;:0,&quot;trait&quot;:0,&quot;power&quot;:null,&quot;legacy&quot;:7,&quot;anyNumCopies&quot;:false,&quot;orderTable&quot;:286,&quot;orderDeck&quot;:327}," calcext:value-type="string">
            <text:p>{"id":"3-58","name":"茅葺き屋根の張出し舞台","displayName":"茅葺き屋根の張出し舞台","kana":"かやぶきやねのはりだしぶたい","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rarity":1,"type":2,"level":3,"color":8,"term":0,"trait":0,"power":null,"legacy":7,"anyNumCopies":false,"orderTable":286,"orderDeck":327},</text:p>
          </table:table-cell>
          <table:table-cell table:number-columns-repeated="16356"/>
        </table:table-row>
        <table:table-row table:style-name="ro2">
          <table:table-cell table:style-name="ce11" office:value-type="float" office:value="287" calcext:value-type="float">
            <text:p>287</text:p>
          </table:table-cell>
          <table:table-cell table:style-name="ce11" office:value-type="float" office:value="315" calcext:value-type="float">
            <text:p>315</text:p>
          </table:table-cell>
          <table:table-cell table:style-name="ce21" office:value-type="string" calcext:value-type="string">
            <text:p>3-59</text:p>
          </table:table-cell>
          <table:table-cell table:style-name="ce21" office:value-type="float" office:value="59" calcext:value-type="float">
            <text:p>59</text:p>
          </table:table-cell>
          <table:table-cell table:style-name="ce11" office:value-type="string" calcext:value-type="string">
            <text:p>森閑たる離宮</text:p>
          </table:table-cell>
          <table:table-cell table:style-name="ce11" table:formula="of:=[.E288]" office:value-type="string" office:string-value="森閑たる離宮" calcext:value-type="string">
            <text:p>森閑たる離宮</text:p>
          </table:table-cell>
          <table:table-cell table:style-name="ce11" office:value-type="string" calcext:value-type="string">
            <text:p>しんかんたるりきゅう</text:p>
          </table:table-cell>
          <table:table-cell table:style-name="ce11" office:value-type="string" calcext:value-type="string">
            <text:p>第３弾ブースターパック</text:p>
          </table:table-cell>
          <table:table-cell table:style-name="ce11" table:formula="of:=VLOOKUP([.H288];[$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8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8];[$種類番号.$A$1:$種類番号.$B$4];2;0)" office:value-type="float" office:value="2" calcext:value-type="float">
            <text:p>2</text:p>
          </table:table-cell>
          <table:table-cell table:style-name="ce11" office:value-type="string" calcext:value-type="string">
            <text:p>紫</text:p>
          </table:table-cell>
          <table:table-cell table:style-name="ce11" table:formula="of:=VLOOKUP([.N288];[$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88];[$特性番号.$A$1:$特性番号.$B$8];2;0);0)" office:value-type="float" office:value="0" calcext:value-type="float">
            <text:p>0</text:p>
          </table:table-cell>
          <table:table-cell table:style-name="ce11"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8];[$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59.png</text:p>
          </table:table-cell>
          <table:table-cell table:style-name="ce11" table:formula="of:=CONCATENATE([$JSON.$A$1];[.$C288];[$JSON.$B$1];[.$E288];[$JSON.$C$1];[.F288];[$JSON.$D$1];[.$G288];[$JSON.$E$1];IF(ISNA([.$T288]);&quot;null&quot;;&quot;&quot;&quot;&quot;&amp;[.$T288]&amp;&quot;&quot;&quot;&quot;);[$JSON.$F$1];[.$V288];[$JSON.$G$1];IF(ISNA([.$X288]);&quot;null&quot;;&quot;&quot;&quot;&quot;&amp;[.$X288]&amp;&quot;&quot;&quot;&quot;);[$JSON.$H$1];[.$AA288];[$JSON.$I$1];[.$I288];[$JSON.$J$1];[.K288];[$JSON.$K$1];[.$M288];[$JSON.$L$1];[.$P288];[$JSON.$M$1];[.$O288];[$JSON.$N$1];[.$S288];[$JSON.$O$1];[.$U288];[$JSON.$P$1];IF(ISNA([.$W288]);&quot;null&quot;;[.$W288]);[$JSON.$Q$1];[.$Y288];[$JSON.$R$1];IF([.$Z288];&quot;true&quot;;&quot;false&quot;);[$JSON.$S$1];[.$A288];[$JSON.$T$1];[.$B288];[$JSON.$U$1])" office:value-type="string" office:string-value="{&quot;id&quot;:&quot;3-59&quot;,&quot;name&quot;:&quot;森閑たる離宮&quot;,&quot;displayName&quot;:&quot;森閑たる離宮&quot;,&quot;kana&quot;:&quot;しんかんたるりきゅう&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rarity&quot;:1,&quot;type&quot;:2,&quot;level&quot;:2,&quot;color&quot;:16,&quot;term&quot;:0,&quot;trait&quot;:0,&quot;power&quot;:null,&quot;legacy&quot;:0,&quot;anyNumCopies&quot;:false,&quot;orderTable&quot;:287,&quot;orderDeck&quot;:315}," calcext:value-type="string">
            <text:p>{"id":"3-59","name":"森閑たる離宮","displayName":"森閑たる離宮","kana":"しんかんたるりきゅう","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rarity":1,"type":2,"level":2,"color":16,"term":0,"trait":0,"power":null,"legacy":0,"anyNumCopies":false,"orderTable":287,"orderDeck":315},</text:p>
          </table:table-cell>
          <table:table-cell table:number-columns-repeated="16356"/>
        </table:table-row>
        <table:table-row table:style-name="ro2">
          <table:table-cell table:style-name="ce11" office:value-type="float" office:value="288" calcext:value-type="float">
            <text:p>288</text:p>
          </table:table-cell>
          <table:table-cell table:style-name="ce11" office:value-type="float" office:value="354" calcext:value-type="float">
            <text:p>354</text:p>
          </table:table-cell>
          <table:table-cell table:style-name="ce21" office:value-type="string" calcext:value-type="string">
            <text:p>3-60</text:p>
          </table:table-cell>
          <table:table-cell table:style-name="ce21" office:value-type="float" office:value="60" calcext:value-type="float">
            <text:p>60</text:p>
          </table:table-cell>
          <table:table-cell table:style-name="ce11" office:value-type="string" calcext:value-type="string">
            <text:p>黒船</text:p>
          </table:table-cell>
          <table:table-cell table:style-name="ce11" table:formula="of:=[.E289]" office:value-type="string" office:string-value="黒船" calcext:value-type="string">
            <text:p>黒船</text:p>
          </table:table-cell>
          <table:table-cell table:style-name="ce11" office:value-type="string" calcext:value-type="string">
            <text:p>くろふね</text:p>
          </table:table-cell>
          <table:table-cell table:style-name="ce11" office:value-type="string" calcext:value-type="string">
            <text:p>第３弾ブースターパック</text:p>
          </table:table-cell>
          <table:table-cell table:style-name="ce11" table:formula="of:=VLOOKUP([.H289];[$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8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289];[$種類番号.$A$1:$種類番号.$B$4];2;0)" office:value-type="float" office:value="2" calcext:value-type="float">
            <text:p>2</text:p>
          </table:table-cell>
          <table:table-cell table:style-name="ce11" office:value-type="string" calcext:value-type="string">
            <text:p>紫</text:p>
          </table:table-cell>
          <table:table-cell table:style-name="ce11" table:formula="of:=VLOOKUP([.N289];[$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28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89];[$特性番号.$A$1:$特性番号.$B$8];2;0);0)" office:value-type="float" office:value="0" calcext:value-type="float">
            <text:p>0</text:p>
          </table:table-cell>
          <table:table-cell table:style-name="ce11"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28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0.png</text:p>
          </table:table-cell>
          <table:table-cell table:style-name="ce11" table:formula="of:=CONCATENATE([$JSON.$A$1];[.$C289];[$JSON.$B$1];[.$E289];[$JSON.$C$1];[.F289];[$JSON.$D$1];[.$G289];[$JSON.$E$1];IF(ISNA([.$T289]);&quot;null&quot;;&quot;&quot;&quot;&quot;&amp;[.$T289]&amp;&quot;&quot;&quot;&quot;);[$JSON.$F$1];[.$V289];[$JSON.$G$1];IF(ISNA([.$X289]);&quot;null&quot;;&quot;&quot;&quot;&quot;&amp;[.$X289]&amp;&quot;&quot;&quot;&quot;);[$JSON.$H$1];[.$AA289];[$JSON.$I$1];[.$I289];[$JSON.$J$1];[.K289];[$JSON.$K$1];[.$M289];[$JSON.$L$1];[.$P289];[$JSON.$M$1];[.$O289];[$JSON.$N$1];[.$S289];[$JSON.$O$1];[.$U289];[$JSON.$P$1];IF(ISNA([.$W289]);&quot;null&quot;;[.$W289]);[$JSON.$Q$1];[.$Y289];[$JSON.$R$1];IF([.$Z289];&quot;true&quot;;&quot;false&quot;);[$JSON.$S$1];[.$A289];[$JSON.$T$1];[.$B289];[$JSON.$U$1])" office:value-type="string" office:string-value="{&quot;id&quot;:&quot;3-60&quot;,&quot;name&quot;:&quot;黒船&quot;,&quot;displayName&quot;:&quot;黒船&quot;,&quot;kana&quot;:&quot;くろふね&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rarity&quot;:1,&quot;type&quot;:2,&quot;level&quot;:6,&quot;color&quot;:16,&quot;term&quot;:0,&quot;trait&quot;:0,&quot;power&quot;:null,&quot;legacy&quot;:0,&quot;anyNumCopies&quot;:false,&quot;orderTable&quot;:288,&quot;orderDeck&quot;:354}," calcext:value-type="string">
            <text:p>{"id":"3-60","name":"黒船","displayName":"黒船","kana":"くろふね","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rarity":1,"type":2,"level":6,"color":16,"term":0,"trait":0,"power":null,"legacy":0,"anyNumCopies":false,"orderTable":288,"orderDeck":354},</text:p>
          </table:table-cell>
          <table:table-cell table:number-columns-repeated="16356"/>
        </table:table-row>
        <table:table-row table:style-name="ro2">
          <table:table-cell table:style-name="ce11" office:value-type="float" office:value="289" calcext:value-type="float">
            <text:p>289</text:p>
          </table:table-cell>
          <table:table-cell table:style-name="ce11" office:value-type="float" office:value="423" calcext:value-type="float">
            <text:p>423</text:p>
          </table:table-cell>
          <table:table-cell table:style-name="ce21" office:value-type="string" calcext:value-type="string">
            <text:p>3-61</text:p>
          </table:table-cell>
          <table:table-cell table:style-name="ce21" office:value-type="float" office:value="61" calcext:value-type="float">
            <text:p>61</text:p>
          </table:table-cell>
          <table:table-cell table:style-name="ce11" office:value-type="string" calcext:value-type="string">
            <text:p>サンダーボルト</text:p>
          </table:table-cell>
          <table:table-cell table:style-name="ce11" table:formula="of:=[.E290]" office:value-type="string" office:string-value="サンダーボルト" calcext:value-type="string">
            <text:p>サンダーボルト</text:p>
          </table:table-cell>
          <table:table-cell table:style-name="ce11" office:value-type="string" calcext:value-type="string">
            <text:p>さんだーぼると</text:p>
          </table:table-cell>
          <table:table-cell table:style-name="ce11" office:value-type="string" calcext:value-type="string">
            <text:p>第３弾ブースターパック</text:p>
          </table:table-cell>
          <table:table-cell table:style-name="ce11" table:formula="of:=VLOOKUP([.H290];[$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90];[$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0];[$種類番号.$A$1:$種類番号.$B$4];2;0)" office:value-type="float" office:value="3" calcext:value-type="float">
            <text:p>3</text:p>
          </table:table-cell>
          <table:table-cell table:style-name="ce11" office:value-type="string" calcext:value-type="string">
            <text:p>赤</text:p>
          </table:table-cell>
          <table:table-cell table:style-name="ce11" table:formula="of:=VLOOKUP([.N290];[$色番号.$A$1:$色番号.$B$10];2;0)" office:value-type="float" office:value="1" calcext:value-type="float">
            <text:p>1</text:p>
          </table:table-cell>
          <table:table-cell table:style-name="ce11" office:value-type="float" office:value="6" calcext:value-type="float">
            <text:p>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IFERROR(VLOOKUP([.$R29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90];[$特性番号.$A$1:$特性番号.$B$8];2;0);0)" office:value-type="float" office:value="0" calcext:value-type="float">
            <text:p>0</text:p>
          </table:table-cell>
          <table:table-cell table:style-name="ce11"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1.png</text:p>
          </table:table-cell>
          <table:table-cell table:style-name="ce11" table:formula="of:=CONCATENATE([$JSON.$A$1];[.$C290];[$JSON.$B$1];[.$E290];[$JSON.$C$1];[.F290];[$JSON.$D$1];[.$G290];[$JSON.$E$1];IF(ISNA([.$T290]);&quot;null&quot;;&quot;&quot;&quot;&quot;&amp;[.$T290]&amp;&quot;&quot;&quot;&quot;);[$JSON.$F$1];[.$V290];[$JSON.$G$1];IF(ISNA([.$X290]);&quot;null&quot;;&quot;&quot;&quot;&quot;&amp;[.$X290]&amp;&quot;&quot;&quot;&quot;);[$JSON.$H$1];[.$AA290];[$JSON.$I$1];[.$I290];[$JSON.$J$1];[.K290];[$JSON.$K$1];[.$M290];[$JSON.$L$1];[.$P290];[$JSON.$M$1];[.$O290];[$JSON.$N$1];[.$S290];[$JSON.$O$1];[.$U290];[$JSON.$P$1];IF(ISNA([.$W290]);&quot;null&quot;;[.$W290]);[$JSON.$Q$1];[.$Y290];[$JSON.$R$1];IF([.$Z290];&quot;true&quot;;&quot;false&quot;);[$JSON.$S$1];[.$A290];[$JSON.$T$1];[.$B290];[$JSON.$U$1])" office:value-type="string" office:string-value="{&quot;id&quot;:&quot;3-61&quot;,&quot;name&quot;:&quot;サンダーボルト&quot;,&quot;displayName&quot;:&quot;サンダーボルト&quot;,&quot;kana&quot;:&quot;さんだーぼると&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rarity&quot;:2,&quot;type&quot;:3,&quot;level&quot;:6,&quot;color&quot;:1,&quot;term&quot;:0,&quot;trait&quot;:0,&quot;power&quot;:null,&quot;legacy&quot;:1,&quot;anyNumCopies&quot;:false,&quot;orderTable&quot;:289,&quot;orderDeck&quot;:423}," calcext:value-type="string">
            <text:p>{"id":"3-61","name":"サンダーボルト","displayName":"サンダーボルト","kana":"さんだーぼると","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rarity":2,"type":3,"level":6,"color":1,"term":0,"trait":0,"power":null,"legacy":1,"anyNumCopies":false,"orderTable":289,"orderDeck":423},</text:p>
          </table:table-cell>
          <table:table-cell table:number-columns-repeated="16356"/>
        </table:table-row>
        <table:table-row table:style-name="ro2">
          <table:table-cell table:style-name="ce11" office:value-type="float" office:value="290" calcext:value-type="float">
            <text:p>290</text:p>
          </table:table-cell>
          <table:table-cell table:style-name="ce11" office:value-type="float" office:value="372" calcext:value-type="float">
            <text:p>372</text:p>
          </table:table-cell>
          <table:table-cell table:style-name="ce21" office:value-type="string" calcext:value-type="string">
            <text:p>3-62</text:p>
          </table:table-cell>
          <table:table-cell table:style-name="ce21" office:value-type="float" office:value="62" calcext:value-type="float">
            <text:p>62</text:p>
          </table:table-cell>
          <table:table-cell table:style-name="ce11" office:value-type="string" calcext:value-type="string">
            <text:p>パイロオーラ</text:p>
          </table:table-cell>
          <table:table-cell table:style-name="ce11" table:formula="of:=[.E291]" office:value-type="string" office:string-value="パイロオーラ" calcext:value-type="string">
            <text:p>パイロオーラ</text:p>
          </table:table-cell>
          <table:table-cell table:style-name="ce11" office:value-type="string" calcext:value-type="string">
            <text:p>ぱいろおーら</text:p>
          </table:table-cell>
          <table:table-cell table:style-name="ce11" office:value-type="string" calcext:value-type="string">
            <text:p>第３弾ブースターパック</text:p>
          </table:table-cell>
          <table:table-cell table:style-name="ce11" table:formula="of:=VLOOKUP([.H291];[$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9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1];[$種類番号.$A$1:$種類番号.$B$4];2;0)" office:value-type="float" office:value="3" calcext:value-type="float">
            <text:p>3</text:p>
          </table:table-cell>
          <table:table-cell table:style-name="ce11" office:value-type="string" calcext:value-type="string">
            <text:p>赤</text:p>
          </table:table-cell>
          <table:table-cell table:style-name="ce11" table:formula="of:=VLOOKUP([.N291];[$色番号.$A$1:$色番号.$B$10];2;0)" office:value-type="float" office:value="1" calcext:value-type="float">
            <text:p>1</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91];[$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赤の間「アタック+4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2.png</text:p>
          </table:table-cell>
          <table:table-cell table:style-name="ce11" table:formula="of:=CONCATENATE([$JSON.$A$1];[.$C291];[$JSON.$B$1];[.$E291];[$JSON.$C$1];[.F291];[$JSON.$D$1];[.$G291];[$JSON.$E$1];IF(ISNA([.$T291]);&quot;null&quot;;&quot;&quot;&quot;&quot;&amp;[.$T291]&amp;&quot;&quot;&quot;&quot;);[$JSON.$F$1];[.$V291];[$JSON.$G$1];IF(ISNA([.$X291]);&quot;null&quot;;&quot;&quot;&quot;&quot;&amp;[.$X291]&amp;&quot;&quot;&quot;&quot;);[$JSON.$H$1];[.$AA291];[$JSON.$I$1];[.$I291];[$JSON.$J$1];[.K291];[$JSON.$K$1];[.$M291];[$JSON.$L$1];[.$P291];[$JSON.$M$1];[.$O291];[$JSON.$N$1];[.$S291];[$JSON.$O$1];[.$U291];[$JSON.$P$1];IF(ISNA([.$W291]);&quot;null&quot;;[.$W291]);[$JSON.$Q$1];[.$Y291];[$JSON.$R$1];IF([.$Z291];&quot;true&quot;;&quot;false&quot;);[$JSON.$S$1];[.$A291];[$JSON.$T$1];[.$B291];[$JSON.$U$1])" office:value-type="string" office:string-value="{&quot;id&quot;:&quot;3-62&quot;,&quot;name&quot;:&quot;パイロオーラ&quot;,&quot;displayName&quot;:&quot;パイロオーラ&quot;,&quot;kana&quot;:&quot;ぱいろおーら&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rarity&quot;:1,&quot;type&quot;:3,&quot;level&quot;:2,&quot;color&quot;:1,&quot;term&quot;:0,&quot;trait&quot;:0,&quot;power&quot;:null,&quot;legacy&quot;:1,&quot;anyNumCopies&quot;:false,&quot;orderTable&quot;:290,&quot;orderDeck&quot;:372}," calcext:value-type="string">
            <text:p>{"id":"3-62","name":"パイロオーラ","displayName":"パイロオーラ","kana":"ぱいろおーら","traitText":null,"ruleText":"1ドローする。¶マホウ使用によって墓地に置かれる際「冥装」を得た状態で墓地に置かれる。¶装備 : これが赤の間「アタック+4000」を得る。","legacyText":"魔力化","imageUrl":"https://one-draw.jp/ijinden/cardlist/003/card/03_062.png","expansion":35,"rarity":1,"type":3,"level":2,"color":1,"term":0,"trait":0,"power":null,"legacy":1,"anyNumCopies":false,"orderTable":290,"orderDeck":372},</text:p>
          </table:table-cell>
          <table:table-cell table:number-columns-repeated="16356"/>
        </table:table-row>
        <table:table-row table:style-name="ro2">
          <table:table-cell table:style-name="ce11" office:value-type="float" office:value="291" calcext:value-type="float">
            <text:p>291</text:p>
          </table:table-cell>
          <table:table-cell table:style-name="ce11" office:value-type="float" office:value="428" calcext:value-type="float">
            <text:p>428</text:p>
          </table:table-cell>
          <table:table-cell table:style-name="ce21" office:value-type="string" calcext:value-type="string">
            <text:p>3-63</text:p>
          </table:table-cell>
          <table:table-cell table:style-name="ce21" office:value-type="float" office:value="63" calcext:value-type="float">
            <text:p>63</text:p>
          </table:table-cell>
          <table:table-cell table:style-name="ce11" office:value-type="string" calcext:value-type="string">
            <text:p>アイオン</text:p>
          </table:table-cell>
          <table:table-cell table:style-name="ce11" table:formula="of:=[.E292]" office:value-type="string" office:string-value="アイオン" calcext:value-type="string">
            <text:p>アイオン</text:p>
          </table:table-cell>
          <table:table-cell table:style-name="ce11" office:value-type="string" calcext:value-type="string">
            <text:p>あいおん</text:p>
          </table:table-cell>
          <table:table-cell table:style-name="ce11" office:value-type="string" calcext:value-type="string">
            <text:p>第３弾ブースターパック</text:p>
          </table:table-cell>
          <table:table-cell table:style-name="ce11" table:formula="of:=VLOOKUP([.H292];[$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92];[$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2];[$種類番号.$A$1:$種類番号.$B$4];2;0)" office:value-type="float" office:value="3" calcext:value-type="float">
            <text:p>3</text:p>
          </table:table-cell>
          <table:table-cell table:style-name="ce11" office:value-type="string" calcext:value-type="string">
            <text:p>青</text:p>
          </table:table-cell>
          <table:table-cell table:style-name="ce11" table:formula="of:=VLOOKUP([.N292];[$色番号.$A$1:$色番号.$B$10];2;0)" office:value-type="float" office:value="2" calcext:value-type="float">
            <text:p>2</text:p>
          </table:table-cell>
          <table:table-cell table:style-name="ce11" office:value-type="float" office:value="10" calcext:value-type="float">
            <text:p>10</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92];[$特性番号.$A$1:$特性番号.$B$8];2;0);0)" office:value-type="float" office:value="0" calcext:value-type="float">
            <text:p>0</text:p>
          </table:table-cell>
          <table:table-cell table:style-name="ce11"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292];[$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3.png</text:p>
          </table:table-cell>
          <table:table-cell table:style-name="ce11" table:formula="of:=CONCATENATE([$JSON.$A$1];[.$C292];[$JSON.$B$1];[.$E292];[$JSON.$C$1];[.F292];[$JSON.$D$1];[.$G292];[$JSON.$E$1];IF(ISNA([.$T292]);&quot;null&quot;;&quot;&quot;&quot;&quot;&amp;[.$T292]&amp;&quot;&quot;&quot;&quot;);[$JSON.$F$1];[.$V292];[$JSON.$G$1];IF(ISNA([.$X292]);&quot;null&quot;;&quot;&quot;&quot;&quot;&amp;[.$X292]&amp;&quot;&quot;&quot;&quot;);[$JSON.$H$1];[.$AA292];[$JSON.$I$1];[.$I292];[$JSON.$J$1];[.K292];[$JSON.$K$1];[.$M292];[$JSON.$L$1];[.$P292];[$JSON.$M$1];[.$O292];[$JSON.$N$1];[.$S292];[$JSON.$O$1];[.$U292];[$JSON.$P$1];IF(ISNA([.$W292]);&quot;null&quot;;[.$W292]);[$JSON.$Q$1];[.$Y292];[$JSON.$R$1];IF([.$Z292];&quot;true&quot;;&quot;false&quot;);[$JSON.$S$1];[.$A292];[$JSON.$T$1];[.$B292];[$JSON.$U$1])" office:value-type="string" office:string-value="{&quot;id&quot;:&quot;3-63&quot;,&quot;name&quot;:&quot;アイオン&quot;,&quot;displayName&quot;:&quot;アイオン&quot;,&quot;kana&quot;:&quot;あいおん&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rarity&quot;:2,&quot;type&quot;:3,&quot;level&quot;:10,&quot;color&quot;:2,&quot;term&quot;:0,&quot;trait&quot;:0,&quot;power&quot;:null,&quot;legacy&quot;:5,&quot;anyNumCopies&quot;:false,&quot;orderTable&quot;:291,&quot;orderDeck&quot;:428}," calcext:value-type="string">
            <text:p>{"id":"3-63","name":"アイオン","displayName":"アイオン","kana":"あいおん","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rarity":2,"type":3,"level":10,"color":2,"term":0,"trait":0,"power":null,"legacy":5,"anyNumCopies":false,"orderTable":291,"orderDeck":428},</text:p>
          </table:table-cell>
          <table:table-cell table:number-columns-repeated="16356"/>
        </table:table-row>
        <table:table-row table:style-name="ro2">
          <table:table-cell table:style-name="ce11" office:value-type="float" office:value="292" calcext:value-type="float">
            <text:p>292</text:p>
          </table:table-cell>
          <table:table-cell table:style-name="ce11" office:value-type="float" office:value="376" calcext:value-type="float">
            <text:p>376</text:p>
          </table:table-cell>
          <table:table-cell table:style-name="ce21" office:value-type="string" calcext:value-type="string">
            <text:p>3-64</text:p>
          </table:table-cell>
          <table:table-cell table:style-name="ce21" office:value-type="float" office:value="64" calcext:value-type="float">
            <text:p>64</text:p>
          </table:table-cell>
          <table:table-cell table:style-name="ce11" office:value-type="string" calcext:value-type="string">
            <text:p>ハイドロオーラ</text:p>
          </table:table-cell>
          <table:table-cell table:style-name="ce11" table:formula="of:=[.E293]" office:value-type="string" office:string-value="ハイドロオーラ" calcext:value-type="string">
            <text:p>ハイドロオーラ</text:p>
          </table:table-cell>
          <table:table-cell table:style-name="ce11" office:value-type="string" calcext:value-type="string">
            <text:p>はいどろおーら</text:p>
          </table:table-cell>
          <table:table-cell table:style-name="ce11" office:value-type="string" calcext:value-type="string">
            <text:p>第３弾ブースターパック</text:p>
          </table:table-cell>
          <table:table-cell table:style-name="ce11" table:formula="of:=VLOOKUP([.H293];[$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9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3];[$種類番号.$A$1:$種類番号.$B$4];2;0)" office:value-type="float" office:value="3" calcext:value-type="float">
            <text:p>3</text:p>
          </table:table-cell>
          <table:table-cell table:style-name="ce11" office:value-type="string" calcext:value-type="string">
            <text:p>青</text:p>
          </table:table-cell>
          <table:table-cell table:style-name="ce11" table:formula="of:=VLOOKUP([.N293];[$色番号.$A$1:$色番号.$B$10];2;0)" office:value-type="float" office:value="2" calcext:value-type="float">
            <text:p>2</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93];[$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青の間「ブロック+4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4.png</text:p>
          </table:table-cell>
          <table:table-cell table:style-name="ce11" table:formula="of:=CONCATENATE([$JSON.$A$1];[.$C293];[$JSON.$B$1];[.$E293];[$JSON.$C$1];[.F293];[$JSON.$D$1];[.$G293];[$JSON.$E$1];IF(ISNA([.$T293]);&quot;null&quot;;&quot;&quot;&quot;&quot;&amp;[.$T293]&amp;&quot;&quot;&quot;&quot;);[$JSON.$F$1];[.$V293];[$JSON.$G$1];IF(ISNA([.$X293]);&quot;null&quot;;&quot;&quot;&quot;&quot;&amp;[.$X293]&amp;&quot;&quot;&quot;&quot;);[$JSON.$H$1];[.$AA293];[$JSON.$I$1];[.$I293];[$JSON.$J$1];[.K293];[$JSON.$K$1];[.$M293];[$JSON.$L$1];[.$P293];[$JSON.$M$1];[.$O293];[$JSON.$N$1];[.$S293];[$JSON.$O$1];[.$U293];[$JSON.$P$1];IF(ISNA([.$W293]);&quot;null&quot;;[.$W293]);[$JSON.$Q$1];[.$Y293];[$JSON.$R$1];IF([.$Z293];&quot;true&quot;;&quot;false&quot;);[$JSON.$S$1];[.$A293];[$JSON.$T$1];[.$B293];[$JSON.$U$1])" office:value-type="string" office:string-value="{&quot;id&quot;:&quot;3-64&quot;,&quot;name&quot;:&quot;ハイドロオーラ&quot;,&quot;displayName&quot;:&quot;ハイドロオーラ&quot;,&quot;kana&quot;:&quot;はいどろおーら&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rarity&quot;:1,&quot;type&quot;:3,&quot;level&quot;:2,&quot;color&quot;:2,&quot;term&quot;:0,&quot;trait&quot;:0,&quot;power&quot;:null,&quot;legacy&quot;:1,&quot;anyNumCopies&quot;:false,&quot;orderTable&quot;:292,&quot;orderDeck&quot;:376}," calcext:value-type="string">
            <text:p>{"id":"3-64","name":"ハイドロオーラ","displayName":"ハイドロオーラ","kana":"はいどろおーら","traitText":null,"ruleText":"1ドローする。¶マホウ使用によって墓地に置かれる際「冥装」を得た状態で墓地に置かれる。¶装備 : これが青の間「ブロック+4000」を得る。","legacyText":"魔力化","imageUrl":"https://one-draw.jp/ijinden/cardlist/003/card/03_064.png","expansion":35,"rarity":1,"type":3,"level":2,"color":2,"term":0,"trait":0,"power":null,"legacy":1,"anyNumCopies":false,"orderTable":292,"orderDeck":376},</text:p>
          </table:table-cell>
          <table:table-cell table:number-columns-repeated="16356"/>
        </table:table-row>
        <table:table-row table:style-name="ro2">
          <table:table-cell table:style-name="ce11" office:value-type="float" office:value="293" calcext:value-type="float">
            <text:p>293</text:p>
          </table:table-cell>
          <table:table-cell table:style-name="ce11" office:value-type="float" office:value="414" calcext:value-type="float">
            <text:p>414</text:p>
          </table:table-cell>
          <table:table-cell table:style-name="ce21" office:value-type="string" calcext:value-type="string">
            <text:p>3-65</text:p>
          </table:table-cell>
          <table:table-cell table:style-name="ce21" office:value-type="float" office:value="65" calcext:value-type="float">
            <text:p>65</text:p>
          </table:table-cell>
          <table:table-cell table:style-name="ce11" office:value-type="string" calcext:value-type="string">
            <text:p>ソーサリー</text:p>
          </table:table-cell>
          <table:table-cell table:style-name="ce11" table:formula="of:=[.E294]" office:value-type="string" office:string-value="ソーサリー" calcext:value-type="string">
            <text:p>ソーサリー</text:p>
          </table:table-cell>
          <table:table-cell table:style-name="ce11" office:value-type="string" calcext:value-type="string">
            <text:p>そーさりー</text:p>
          </table:table-cell>
          <table:table-cell table:style-name="ce11" office:value-type="string" calcext:value-type="string">
            <text:p>第３弾ブースターパック</text:p>
          </table:table-cell>
          <table:table-cell table:style-name="ce11" table:formula="of:=VLOOKUP([.H294];[$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9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4];[$種類番号.$A$1:$種類番号.$B$4];2;0)" office:value-type="float" office:value="3" calcext:value-type="float">
            <text:p>3</text:p>
          </table:table-cell>
          <table:table-cell table:style-name="ce11" office:value-type="string" calcext:value-type="string">
            <text:p>緑</text:p>
          </table:table-cell>
          <table:table-cell table:style-name="ce11" table:formula="of:=VLOOKUP([.N294];[$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94];[$特性番号.$A$1:$特性番号.$B$8];2;0);0)" office:value-type="float" office:value="0" calcext:value-type="float">
            <text:p>0</text:p>
          </table:table-cell>
          <table:table-cell table:style-name="ce11"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5.png</text:p>
          </table:table-cell>
          <table:table-cell table:style-name="ce11" table:formula="of:=CONCATENATE([$JSON.$A$1];[.$C294];[$JSON.$B$1];[.$E294];[$JSON.$C$1];[.F294];[$JSON.$D$1];[.$G294];[$JSON.$E$1];IF(ISNA([.$T294]);&quot;null&quot;;&quot;&quot;&quot;&quot;&amp;[.$T294]&amp;&quot;&quot;&quot;&quot;);[$JSON.$F$1];[.$V294];[$JSON.$G$1];IF(ISNA([.$X294]);&quot;null&quot;;&quot;&quot;&quot;&quot;&amp;[.$X294]&amp;&quot;&quot;&quot;&quot;);[$JSON.$H$1];[.$AA294];[$JSON.$I$1];[.$I294];[$JSON.$J$1];[.K294];[$JSON.$K$1];[.$M294];[$JSON.$L$1];[.$P294];[$JSON.$M$1];[.$O294];[$JSON.$N$1];[.$S294];[$JSON.$O$1];[.$U294];[$JSON.$P$1];IF(ISNA([.$W294]);&quot;null&quot;;[.$W294]);[$JSON.$Q$1];[.$Y294];[$JSON.$R$1];IF([.$Z294];&quot;true&quot;;&quot;false&quot;);[$JSON.$S$1];[.$A294];[$JSON.$T$1];[.$B294];[$JSON.$U$1])" office:value-type="string" office:string-value="{&quot;id&quot;:&quot;3-65&quot;,&quot;name&quot;:&quot;ソーサリー&quot;,&quot;displayName&quot;:&quot;ソーサリー&quot;,&quot;kana&quot;:&quot;そーさり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rarity&quot;:1,&quot;type&quot;:3,&quot;level&quot;:5,&quot;color&quot;:4,&quot;term&quot;:0,&quot;trait&quot;:0,&quot;power&quot;:null,&quot;legacy&quot;:2,&quot;anyNumCopies&quot;:false,&quot;orderTable&quot;:293,&quot;orderDeck&quot;:414}," calcext:value-type="string">
            <text:p>{"id":"3-65","name":"ソーサリー","displayName":"ソーサリー","kana":"そーさり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rarity":1,"type":3,"level":5,"color":4,"term":0,"trait":0,"power":null,"legacy":2,"anyNumCopies":false,"orderTable":293,"orderDeck":414},</text:p>
          </table:table-cell>
          <table:table-cell table:number-columns-repeated="16356"/>
        </table:table-row>
        <table:table-row table:style-name="ro2">
          <table:table-cell table:style-name="ce11" office:value-type="float" office:value="294" calcext:value-type="float">
            <text:p>294</text:p>
          </table:table-cell>
          <table:table-cell table:style-name="ce11" office:value-type="float" office:value="378" calcext:value-type="float">
            <text:p>378</text:p>
          </table:table-cell>
          <table:table-cell table:style-name="ce21" office:value-type="string" calcext:value-type="string">
            <text:p>3-66</text:p>
          </table:table-cell>
          <table:table-cell table:style-name="ce21" office:value-type="float" office:value="66" calcext:value-type="float">
            <text:p>66</text:p>
          </table:table-cell>
          <table:table-cell table:style-name="ce11" office:value-type="string" calcext:value-type="string">
            <text:p>クロロオーラ</text:p>
          </table:table-cell>
          <table:table-cell table:style-name="ce11" table:formula="of:=[.E295]" office:value-type="string" office:string-value="クロロオーラ" calcext:value-type="string">
            <text:p>クロロオーラ</text:p>
          </table:table-cell>
          <table:table-cell table:style-name="ce11" office:value-type="string" calcext:value-type="string">
            <text:p>くろろおーら</text:p>
          </table:table-cell>
          <table:table-cell table:style-name="ce11" office:value-type="string" calcext:value-type="string">
            <text:p>第３弾ブースターパック</text:p>
          </table:table-cell>
          <table:table-cell table:style-name="ce11" table:formula="of:=VLOOKUP([.H295];[$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9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5];[$種類番号.$A$1:$種類番号.$B$4];2;0)" office:value-type="float" office:value="3" calcext:value-type="float">
            <text:p>3</text:p>
          </table:table-cell>
          <table:table-cell table:style-name="ce11" office:value-type="string" calcext:value-type="string">
            <text:p>緑</text:p>
          </table:table-cell>
          <table:table-cell table:style-name="ce11" table:formula="of:=VLOOKUP([.N295];[$色番号.$A$1:$色番号.$B$10];2;0)" office:value-type="float" office:value="4" calcext:value-type="float">
            <text:p>4</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95];[$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緑の間「パワー+3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6.png</text:p>
          </table:table-cell>
          <table:table-cell table:style-name="ce11" table:formula="of:=CONCATENATE([$JSON.$A$1];[.$C295];[$JSON.$B$1];[.$E295];[$JSON.$C$1];[.F295];[$JSON.$D$1];[.$G295];[$JSON.$E$1];IF(ISNA([.$T295]);&quot;null&quot;;&quot;&quot;&quot;&quot;&amp;[.$T295]&amp;&quot;&quot;&quot;&quot;);[$JSON.$F$1];[.$V295];[$JSON.$G$1];IF(ISNA([.$X295]);&quot;null&quot;;&quot;&quot;&quot;&quot;&amp;[.$X295]&amp;&quot;&quot;&quot;&quot;);[$JSON.$H$1];[.$AA295];[$JSON.$I$1];[.$I295];[$JSON.$J$1];[.K295];[$JSON.$K$1];[.$M295];[$JSON.$L$1];[.$P295];[$JSON.$M$1];[.$O295];[$JSON.$N$1];[.$S295];[$JSON.$O$1];[.$U295];[$JSON.$P$1];IF(ISNA([.$W295]);&quot;null&quot;;[.$W295]);[$JSON.$Q$1];[.$Y295];[$JSON.$R$1];IF([.$Z295];&quot;true&quot;;&quot;false&quot;);[$JSON.$S$1];[.$A295];[$JSON.$T$1];[.$B295];[$JSON.$U$1])" office:value-type="string" office:string-value="{&quot;id&quot;:&quot;3-66&quot;,&quot;name&quot;:&quot;クロロオーラ&quot;,&quot;displayName&quot;:&quot;クロロオーラ&quot;,&quot;kana&quot;:&quot;くろろおーら&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rarity&quot;:1,&quot;type&quot;:3,&quot;level&quot;:2,&quot;color&quot;:4,&quot;term&quot;:0,&quot;trait&quot;:0,&quot;power&quot;:null,&quot;legacy&quot;:1,&quot;anyNumCopies&quot;:false,&quot;orderTable&quot;:294,&quot;orderDeck&quot;:378}," calcext:value-type="string">
            <text:p>{"id":"3-66","name":"クロロオーラ","displayName":"クロロオーラ","kana":"くろろおーら","traitText":null,"ruleText":"1ドローする。¶マホウ使用によって墓地に置かれる際「冥装」を得た状態で墓地に置かれる。¶装備 : これが緑の間「パワー+3000」を得る。","legacyText":"魔力化","imageUrl":"https://one-draw.jp/ijinden/cardlist/003/card/03_066.png","expansion":35,"rarity":1,"type":3,"level":2,"color":4,"term":0,"trait":0,"power":null,"legacy":1,"anyNumCopies":false,"orderTable":294,"orderDeck":378},</text:p>
          </table:table-cell>
          <table:table-cell table:number-columns-repeated="16356"/>
        </table:table-row>
        <table:table-row table:style-name="ro2">
          <table:table-cell table:style-name="ce11" office:value-type="float" office:value="295" calcext:value-type="float">
            <text:p>295</text:p>
          </table:table-cell>
          <table:table-cell table:style-name="ce11" office:value-type="float" office:value="379" calcext:value-type="float">
            <text:p>379</text:p>
          </table:table-cell>
          <table:table-cell table:style-name="ce21" office:value-type="string" calcext:value-type="string">
            <text:p>3-67</text:p>
          </table:table-cell>
          <table:table-cell table:style-name="ce21" office:value-type="float" office:value="67" calcext:value-type="float">
            <text:p>67</text:p>
          </table:table-cell>
          <table:table-cell table:style-name="ce11" office:value-type="string" calcext:value-type="string">
            <text:p>パシフィック</text:p>
          </table:table-cell>
          <table:table-cell table:style-name="ce11" table:formula="of:=[.E296]" office:value-type="string" office:string-value="パシフィック" calcext:value-type="string">
            <text:p>パシフィック</text:p>
          </table:table-cell>
          <table:table-cell table:style-name="ce11" office:value-type="string" calcext:value-type="string">
            <text:p>ぱしふぃっく</text:p>
          </table:table-cell>
          <table:table-cell table:style-name="ce11" office:value-type="string" calcext:value-type="string">
            <text:p>第３弾ブースターパック</text:p>
          </table:table-cell>
          <table:table-cell table:style-name="ce11" table:formula="of:=VLOOKUP([.H296];[$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9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6];[$種類番号.$A$1:$種類番号.$B$4];2;0)" office:value-type="float" office:value="3" calcext:value-type="float">
            <text:p>3</text:p>
          </table:table-cell>
          <table:table-cell table:style-name="ce11" office:value-type="string" calcext:value-type="string">
            <text:p>黄</text:p>
          </table:table-cell>
          <table:table-cell table:style-name="ce11" table:formula="of:=VLOOKUP([.N296];[$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96];[$特性番号.$A$1:$特性番号.$B$8];2;0);0)" office:value-type="float" office:value="0" calcext:value-type="float">
            <text:p>0</text:p>
          </table:table-cell>
          <table:table-cell table:style-name="ce11"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6];[$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7.png</text:p>
          </table:table-cell>
          <table:table-cell table:style-name="ce11" table:formula="of:=CONCATENATE([$JSON.$A$1];[.$C296];[$JSON.$B$1];[.$E296];[$JSON.$C$1];[.F296];[$JSON.$D$1];[.$G296];[$JSON.$E$1];IF(ISNA([.$T296]);&quot;null&quot;;&quot;&quot;&quot;&quot;&amp;[.$T296]&amp;&quot;&quot;&quot;&quot;);[$JSON.$F$1];[.$V296];[$JSON.$G$1];IF(ISNA([.$X296]);&quot;null&quot;;&quot;&quot;&quot;&quot;&amp;[.$X296]&amp;&quot;&quot;&quot;&quot;);[$JSON.$H$1];[.$AA296];[$JSON.$I$1];[.$I296];[$JSON.$J$1];[.K296];[$JSON.$K$1];[.$M296];[$JSON.$L$1];[.$P296];[$JSON.$M$1];[.$O296];[$JSON.$N$1];[.$S296];[$JSON.$O$1];[.$U296];[$JSON.$P$1];IF(ISNA([.$W296]);&quot;null&quot;;[.$W296]);[$JSON.$Q$1];[.$Y296];[$JSON.$R$1];IF([.$Z296];&quot;true&quot;;&quot;false&quot;);[$JSON.$S$1];[.$A296];[$JSON.$T$1];[.$B296];[$JSON.$U$1])" office:value-type="string" office:string-value="{&quot;id&quot;:&quot;3-67&quot;,&quot;name&quot;:&quot;パシフィック&quot;,&quot;displayName&quot;:&quot;パシフィック&quot;,&quot;kana&quot;:&quot;ぱしふぃっく&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rarity&quot;:1,&quot;type&quot;:3,&quot;level&quot;:2,&quot;color&quot;:8,&quot;term&quot;:0,&quot;trait&quot;:0,&quot;power&quot;:null,&quot;legacy&quot;:2,&quot;anyNumCopies&quot;:false,&quot;orderTable&quot;:295,&quot;orderDeck&quot;:379}," calcext:value-type="string">
            <text:p>{"id":"3-67","name":"パシフィック","displayName":"パシフィック","kana":"ぱしふぃっく","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rarity":1,"type":3,"level":2,"color":8,"term":0,"trait":0,"power":null,"legacy":2,"anyNumCopies":false,"orderTable":295,"orderDeck":379},</text:p>
          </table:table-cell>
          <table:table-cell table:number-columns-repeated="16356"/>
        </table:table-row>
        <table:table-row table:style-name="ro2">
          <table:table-cell table:style-name="ce11" office:value-type="float" office:value="296" calcext:value-type="float">
            <text:p>296</text:p>
          </table:table-cell>
          <table:table-cell table:style-name="ce11" office:value-type="float" office:value="381" calcext:value-type="float">
            <text:p>381</text:p>
          </table:table-cell>
          <table:table-cell table:style-name="ce21" office:value-type="string" calcext:value-type="string">
            <text:p>3-68</text:p>
          </table:table-cell>
          <table:table-cell table:style-name="ce21" office:value-type="float" office:value="68" calcext:value-type="float">
            <text:p>68</text:p>
          </table:table-cell>
          <table:table-cell table:style-name="ce11" office:value-type="string" calcext:value-type="string">
            <text:p>ジオオーラ</text:p>
          </table:table-cell>
          <table:table-cell table:style-name="ce11" table:formula="of:=[.E297]" office:value-type="string" office:string-value="ジオオーラ" calcext:value-type="string">
            <text:p>ジオオーラ</text:p>
          </table:table-cell>
          <table:table-cell table:style-name="ce11" office:value-type="string" calcext:value-type="string">
            <text:p>じおおーら</text:p>
          </table:table-cell>
          <table:table-cell table:style-name="ce11" office:value-type="string" calcext:value-type="string">
            <text:p>第３弾ブースターパック</text:p>
          </table:table-cell>
          <table:table-cell table:style-name="ce11" table:formula="of:=VLOOKUP([.H297];[$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97];[$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7];[$種類番号.$A$1:$種類番号.$B$4];2;0)" office:value-type="float" office:value="3" calcext:value-type="float">
            <text:p>3</text:p>
          </table:table-cell>
          <table:table-cell table:style-name="ce11" office:value-type="string" calcext:value-type="string">
            <text:p>黄</text:p>
          </table:table-cell>
          <table:table-cell table:style-name="ce11" table:formula="of:=VLOOKUP([.N297];[$色番号.$A$1:$色番号.$B$10];2;0)" office:value-type="float" office:value="8" calcext:value-type="float">
            <text:p>8</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97];[$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黄の間「ウォッチャー ブロック+2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8.png</text:p>
          </table:table-cell>
          <table:table-cell table:style-name="ce11" table:formula="of:=CONCATENATE([$JSON.$A$1];[.$C297];[$JSON.$B$1];[.$E297];[$JSON.$C$1];[.F297];[$JSON.$D$1];[.$G297];[$JSON.$E$1];IF(ISNA([.$T297]);&quot;null&quot;;&quot;&quot;&quot;&quot;&amp;[.$T297]&amp;&quot;&quot;&quot;&quot;);[$JSON.$F$1];[.$V297];[$JSON.$G$1];IF(ISNA([.$X297]);&quot;null&quot;;&quot;&quot;&quot;&quot;&amp;[.$X297]&amp;&quot;&quot;&quot;&quot;);[$JSON.$H$1];[.$AA297];[$JSON.$I$1];[.$I297];[$JSON.$J$1];[.K297];[$JSON.$K$1];[.$M297];[$JSON.$L$1];[.$P297];[$JSON.$M$1];[.$O297];[$JSON.$N$1];[.$S297];[$JSON.$O$1];[.$U297];[$JSON.$P$1];IF(ISNA([.$W297]);&quot;null&quot;;[.$W297]);[$JSON.$Q$1];[.$Y297];[$JSON.$R$1];IF([.$Z297];&quot;true&quot;;&quot;false&quot;);[$JSON.$S$1];[.$A297];[$JSON.$T$1];[.$B297];[$JSON.$U$1])" office:value-type="string" office:string-value="{&quot;id&quot;:&quot;3-68&quot;,&quot;name&quot;:&quot;ジオオーラ&quot;,&quot;displayName&quot;:&quot;ジオオーラ&quot;,&quot;kana&quot;:&quot;じおおーら&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rarity&quot;:2,&quot;type&quot;:3,&quot;level&quot;:2,&quot;color&quot;:8,&quot;term&quot;:0,&quot;trait&quot;:0,&quot;power&quot;:null,&quot;legacy&quot;:1,&quot;anyNumCopies&quot;:false,&quot;orderTable&quot;:296,&quot;orderDeck&quot;:381}," calcext:value-type="string">
            <text:p>{"id":"3-68","name":"ジオオーラ","displayName":"ジオオーラ","kana":"じおおーら","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rarity":2,"type":3,"level":2,"color":8,"term":0,"trait":0,"power":null,"legacy":1,"anyNumCopies":false,"orderTable":296,"orderDeck":381},</text:p>
          </table:table-cell>
          <table:table-cell table:number-columns-repeated="16356"/>
        </table:table-row>
        <table:table-row table:style-name="ro2">
          <table:table-cell table:style-name="ce11" office:value-type="float" office:value="297" calcext:value-type="float">
            <text:p>297</text:p>
          </table:table-cell>
          <table:table-cell table:style-name="ce11" office:value-type="float" office:value="401" calcext:value-type="float">
            <text:p>401</text:p>
          </table:table-cell>
          <table:table-cell table:style-name="ce21" office:value-type="string" calcext:value-type="string">
            <text:p>3-69</text:p>
          </table:table-cell>
          <table:table-cell table:style-name="ce21" office:value-type="float" office:value="69" calcext:value-type="float">
            <text:p>69</text:p>
          </table:table-cell>
          <table:table-cell table:style-name="ce11" office:value-type="string" calcext:value-type="string">
            <text:p>コーザリティ</text:p>
          </table:table-cell>
          <table:table-cell table:style-name="ce11" table:formula="of:=[.E298]" office:value-type="string" office:string-value="コーザリティ" calcext:value-type="string">
            <text:p>コーザリティ</text:p>
          </table:table-cell>
          <table:table-cell table:style-name="ce11" office:value-type="string" calcext:value-type="string">
            <text:p>こーざりてぃ</text:p>
          </table:table-cell>
          <table:table-cell table:style-name="ce11" office:value-type="string" calcext:value-type="string">
            <text:p>第３弾ブースターパック</text:p>
          </table:table-cell>
          <table:table-cell table:style-name="ce11" table:formula="of:=VLOOKUP([.H298];[$収録番号.$A$1:$収録番号.$B$10];2;0)" office:value-type="float" office:value="35" calcext:value-type="float">
            <text:p>35</text:p>
          </table:table-cell>
          <table:table-cell table:style-name="ce11" office:value-type="string" calcext:value-type="string">
            <text:p>N</text:p>
          </table:table-cell>
          <table:table-cell table:style-name="ce11" table:formula="of:=VLOOKUP([.J29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298];[$種類番号.$A$1:$種類番号.$B$4];2;0)" office:value-type="float" office:value="3" calcext:value-type="float">
            <text:p>3</text:p>
          </table:table-cell>
          <table:table-cell table:style-name="ce11" office:value-type="string" calcext:value-type="string">
            <text:p>紫</text:p>
          </table:table-cell>
          <table:table-cell table:style-name="ce11" table:formula="of:=VLOOKUP([.N298];[$色番号.$A$1:$色番号.$B$10];2;0)" office:value-type="float" office:value="16" calcext:value-type="float">
            <text:p>16</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29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98];[$特性番号.$A$1:$特性番号.$B$8];2;0);0)" office:value-type="float" office:value="0" calcext:value-type="float">
            <text:p>0</text:p>
          </table:table-cell>
          <table:table-cell table:style-name="ce11" office:value-type="string" calcext:value-type="string">
            <text:p>「自分の山札の上から2枚を墓地に置く」か「相手の山札の上から2枚を墓地に置く」を発揮して、墓地のイジン1体を手札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298];[$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69.png</text:p>
          </table:table-cell>
          <table:table-cell table:style-name="ce11" table:formula="of:=CONCATENATE([$JSON.$A$1];[.$C298];[$JSON.$B$1];[.$E298];[$JSON.$C$1];[.F298];[$JSON.$D$1];[.$G298];[$JSON.$E$1];IF(ISNA([.$T298]);&quot;null&quot;;&quot;&quot;&quot;&quot;&amp;[.$T298]&amp;&quot;&quot;&quot;&quot;);[$JSON.$F$1];[.$V298];[$JSON.$G$1];IF(ISNA([.$X298]);&quot;null&quot;;&quot;&quot;&quot;&quot;&amp;[.$X298]&amp;&quot;&quot;&quot;&quot;);[$JSON.$H$1];[.$AA298];[$JSON.$I$1];[.$I298];[$JSON.$J$1];[.K298];[$JSON.$K$1];[.$M298];[$JSON.$L$1];[.$P298];[$JSON.$M$1];[.$O298];[$JSON.$N$1];[.$S298];[$JSON.$O$1];[.$U298];[$JSON.$P$1];IF(ISNA([.$W298]);&quot;null&quot;;[.$W298]);[$JSON.$Q$1];[.$Y298];[$JSON.$R$1];IF([.$Z298];&quot;true&quot;;&quot;false&quot;);[$JSON.$S$1];[.$A298];[$JSON.$T$1];[.$B298];[$JSON.$U$1])" office:value-type="string" office:string-value="{&quot;id&quot;:&quot;3-69&quot;,&quot;name&quot;:&quot;コーザリティ&quot;,&quot;displayName&quot;:&quot;コーザリティ&quot;,&quot;kana&quot;:&quot;こーざりてぃ&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rarity&quot;:1,&quot;type&quot;:3,&quot;level&quot;:3,&quot;color&quot;:16,&quot;term&quot;:0,&quot;trait&quot;:0,&quot;power&quot;:null,&quot;legacy&quot;:2,&quot;anyNumCopies&quot;:false,&quot;orderTable&quot;:297,&quot;orderDeck&quot;:401}," calcext:value-type="string">
            <text:p>{"id":"3-69","name":"コーザリティ","displayName":"コーザリティ","kana":"こーざりてぃ","traitText":null,"ruleText":"「自分の山札の上から2枚を墓地に置く」か「相手の山札の上から2枚を墓地に置く」を発揮して、墓地のイジン1体を手札に戻す。","legacyText":"冥府発動","imageUrl":"https://one-draw.jp/ijinden/cardlist/003/card/03_069.png","expansion":35,"rarity":1,"type":3,"level":3,"color":16,"term":0,"trait":0,"power":null,"legacy":2,"anyNumCopies":false,"orderTable":297,"orderDeck":401},</text:p>
          </table:table-cell>
          <table:table-cell table:number-columns-repeated="16356"/>
        </table:table-row>
        <table:table-row table:style-name="ro2">
          <table:table-cell table:style-name="ce11" office:value-type="float" office:value="298" calcext:value-type="float">
            <text:p>298</text:p>
          </table:table-cell>
          <table:table-cell table:style-name="ce11" office:value-type="float" office:value="382" calcext:value-type="float">
            <text:p>382</text:p>
          </table:table-cell>
          <table:table-cell table:style-name="ce21" office:value-type="string" calcext:value-type="string">
            <text:p>3-70</text:p>
          </table:table-cell>
          <table:table-cell table:style-name="ce21" office:value-type="float" office:value="70" calcext:value-type="float">
            <text:p>70</text:p>
          </table:table-cell>
          <table:table-cell table:style-name="ce11" office:value-type="string" calcext:value-type="string">
            <text:p>エアロオーラ</text:p>
          </table:table-cell>
          <table:table-cell table:style-name="ce11" table:formula="of:=[.E299]" office:value-type="string" office:string-value="エアロオーラ" calcext:value-type="string">
            <text:p>エアロオーラ</text:p>
          </table:table-cell>
          <table:table-cell table:style-name="ce11" office:value-type="string" calcext:value-type="string">
            <text:p>えあろおーら</text:p>
          </table:table-cell>
          <table:table-cell table:style-name="ce11" office:value-type="string" calcext:value-type="string">
            <text:p>第３弾ブースターパック</text:p>
          </table:table-cell>
          <table:table-cell table:style-name="ce11" table:formula="of:=VLOOKUP([.H299];[$収録番号.$A$1:$収録番号.$B$10];2;0)" office:value-type="float" office:value="35" calcext:value-type="float">
            <text:p>35</text:p>
          </table:table-cell>
          <table:table-cell table:style-name="ce11" office:value-type="string" calcext:value-type="string">
            <text:p>R</text:p>
          </table:table-cell>
          <table:table-cell table:style-name="ce11" table:formula="of:=VLOOKUP([.J299];[$レアリティ番号.$A$1:$レアリティ番号.$B$4];2;0)" office:value-type="float" office:value="2" calcext:value-type="float">
            <text:p>2</text:p>
          </table:table-cell>
          <table:table-cell table:style-name="ce11" office:value-type="string" calcext:value-type="string">
            <text:p>マホウ</text:p>
          </table:table-cell>
          <table:table-cell table:style-name="ce11" table:formula="of:=VLOOKUP([.L299];[$種類番号.$A$1:$種類番号.$B$4];2;0)" office:value-type="float" office:value="3" calcext:value-type="float">
            <text:p>3</text:p>
          </table:table-cell>
          <table:table-cell table:style-name="ce11" office:value-type="string" calcext:value-type="string">
            <text:p>紫</text:p>
          </table:table-cell>
          <table:table-cell table:style-name="ce11" table:formula="of:=VLOOKUP([.N299];[$色番号.$A$1:$色番号.$B$10];2;0)" office:value-type="float" office:value="16" calcext:value-type="float">
            <text:p>16</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29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299];[$特性番号.$A$1:$特性番号.$B$8];2;0);0)" office:value-type="float" office:value="0" calcext:value-type="float">
            <text:p>0</text:p>
          </table:table-cell>
          <table:table-cell table:style-name="ce11"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29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0.png</text:p>
          </table:table-cell>
          <table:table-cell table:style-name="ce11" table:formula="of:=CONCATENATE([$JSON.$A$1];[.$C299];[$JSON.$B$1];[.$E299];[$JSON.$C$1];[.F299];[$JSON.$D$1];[.$G299];[$JSON.$E$1];IF(ISNA([.$T299]);&quot;null&quot;;&quot;&quot;&quot;&quot;&amp;[.$T299]&amp;&quot;&quot;&quot;&quot;);[$JSON.$F$1];[.$V299];[$JSON.$G$1];IF(ISNA([.$X299]);&quot;null&quot;;&quot;&quot;&quot;&quot;&amp;[.$X299]&amp;&quot;&quot;&quot;&quot;);[$JSON.$H$1];[.$AA299];[$JSON.$I$1];[.$I299];[$JSON.$J$1];[.K299];[$JSON.$K$1];[.$M299];[$JSON.$L$1];[.$P299];[$JSON.$M$1];[.$O299];[$JSON.$N$1];[.$S299];[$JSON.$O$1];[.$U299];[$JSON.$P$1];IF(ISNA([.$W299]);&quot;null&quot;;[.$W299]);[$JSON.$Q$1];[.$Y299];[$JSON.$R$1];IF([.$Z299];&quot;true&quot;;&quot;false&quot;);[$JSON.$S$1];[.$A299];[$JSON.$T$1];[.$B299];[$JSON.$U$1])" office:value-type="string" office:string-value="{&quot;id&quot;:&quot;3-70&quot;,&quot;name&quot;:&quot;エアロオーラ&quot;,&quot;displayName&quot;:&quot;エアロオーラ&quot;,&quot;kana&quot;:&quot;えあろおーら&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rarity&quot;:2,&quot;type&quot;:3,&quot;level&quot;:2,&quot;color&quot;:16,&quot;term&quot;:0,&quot;trait&quot;:0,&quot;power&quot;:null,&quot;legacy&quot;:1,&quot;anyNumCopies&quot;:false,&quot;orderTable&quot;:298,&quot;orderDeck&quot;:382}," calcext:value-type="string">
            <text:p>{"id":"3-70","name":"エアロオーラ","displayName":"エアロオーラ","kana":"えあろおーら","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rarity":2,"type":3,"level":2,"color":16,"term":0,"trait":0,"power":null,"legacy":1,"anyNumCopies":false,"orderTable":298,"orderDeck":382},</text:p>
          </table:table-cell>
          <table:table-cell table:number-columns-repeated="16356"/>
        </table:table-row>
        <table:table-row table:style-name="ro2">
          <table:table-cell table:style-name="ce11" office:value-type="float" office:value="299" calcext:value-type="float">
            <text:p>299</text:p>
          </table:table-cell>
          <table:table-cell table:style-name="ce11" office:value-type="float" office:value="439" calcext:value-type="float">
            <text:p>439</text:p>
          </table:table-cell>
          <table:table-cell table:style-name="ce21" office:value-type="string" calcext:value-type="string">
            <text:p>3-71</text:p>
          </table:table-cell>
          <table:table-cell table:style-name="ce21" office:value-type="float" office:value="71" calcext:value-type="float">
            <text:p>71</text:p>
          </table:table-cell>
          <table:table-cell table:style-name="ce11" office:value-type="string" calcext:value-type="string">
            <text:p>喜びの種</text:p>
          </table:table-cell>
          <table:table-cell table:style-name="ce11" table:formula="of:=[.E300]" office:value-type="string" office:string-value="喜びの種" calcext:value-type="string">
            <text:p>喜びの種</text:p>
          </table:table-cell>
          <table:table-cell table:style-name="ce11" office:value-type="string" calcext:value-type="string">
            <text:p>よろこびのたね</text:p>
          </table:table-cell>
          <table:table-cell table:style-name="ce11" office:value-type="string" calcext:value-type="string">
            <text:p>第３弾ブースターパック</text:p>
          </table:table-cell>
          <table:table-cell table:style-name="ce11" table:formula="of:=VLOOKUP([.H300];[$収録番号.$A$1:$収録番号.$B$10];2;0)" office:value-type="float" office:value="35" calcext:value-type="float">
            <text:p>35</text:p>
          </table:table-cell>
          <table:table-cell table:style-name="ce11" office:value-type="string" calcext:value-type="string">
            <text:p>N</text:p>
          </table:table-cell>
          <table:table-cell table:style-name="ce11" table:formula="of:=VLOOKUP([.J300];[$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0];[$種類番号.$A$1:$種類番号.$B$4];2;0)" office:value-type="float" office:value="4" calcext:value-type="float">
            <text:p>4</text:p>
          </table:table-cell>
          <table:table-cell table:style-name="ce11" office:value-type="string" calcext:value-type="string">
            <text:p>赤</text:p>
          </table:table-cell>
          <table:table-cell table:style-name="ce11" table:formula="of:=VLOOKUP([.N300];[$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00];[$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1.png</text:p>
          </table:table-cell>
          <table:table-cell table:style-name="ce11" table:formula="of:=CONCATENATE([$JSON.$A$1];[.$C300];[$JSON.$B$1];[.$E300];[$JSON.$C$1];[.F300];[$JSON.$D$1];[.$G300];[$JSON.$E$1];IF(ISNA([.$T300]);&quot;null&quot;;&quot;&quot;&quot;&quot;&amp;[.$T300]&amp;&quot;&quot;&quot;&quot;);[$JSON.$F$1];[.$V300];[$JSON.$G$1];IF(ISNA([.$X300]);&quot;null&quot;;&quot;&quot;&quot;&quot;&amp;[.$X300]&amp;&quot;&quot;&quot;&quot;);[$JSON.$H$1];[.$AA300];[$JSON.$I$1];[.$I300];[$JSON.$J$1];[.K300];[$JSON.$K$1];[.$M300];[$JSON.$L$1];[.$P300];[$JSON.$M$1];[.$O300];[$JSON.$N$1];[.$S300];[$JSON.$O$1];[.$U300];[$JSON.$P$1];IF(ISNA([.$W300]);&quot;null&quot;;[.$W300]);[$JSON.$Q$1];[.$Y300];[$JSON.$R$1];IF([.$Z300];&quot;true&quot;;&quot;false&quot;);[$JSON.$S$1];[.$A300];[$JSON.$T$1];[.$B300];[$JSON.$U$1])" office:value-type="string" office:string-value="{&quot;id&quot;:&quot;3-71&quot;,&quot;name&quot;:&quot;喜びの種&quot;,&quot;displayName&quot;:&quot;喜びの種&quot;,&quot;kana&quot;:&quot;よろこびのたね&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rarity&quot;:1,&quot;type&quot;:4,&quot;level&quot;:1,&quot;color&quot;:1,&quot;term&quot;:0,&quot;trait&quot;:0,&quot;power&quot;:null,&quot;legacy&quot;:1,&quot;anyNumCopies&quot;:false,&quot;orderTable&quot;:299,&quot;orderDeck&quot;:439}," calcext:value-type="string">
            <text:p>{"id":"3-71","name":"喜びの種","displayName":"喜びの種","kana":"よろこびのたね","traitText":null,"ruleText":"魔力ゾーンに置かれたとき、自分の山札の上から1枚を裏のまま魔力ゾーンに置く。","legacyText":"魔力化","imageUrl":"https://one-draw.jp/ijinden/cardlist/003/card/03_071.png","expansion":35,"rarity":1,"type":4,"level":1,"color":1,"term":0,"trait":0,"power":null,"legacy":1,"anyNumCopies":false,"orderTable":299,"orderDeck":439},</text:p>
          </table:table-cell>
          <table:table-cell table:number-columns-repeated="16356"/>
        </table:table-row>
        <table:table-row table:style-name="ro2">
          <table:table-cell table:style-name="ce11" office:value-type="float" office:value="300" calcext:value-type="float">
            <text:p>300</text:p>
          </table:table-cell>
          <table:table-cell table:style-name="ce11" office:value-type="float" office:value="446" calcext:value-type="float">
            <text:p>446</text:p>
          </table:table-cell>
          <table:table-cell table:style-name="ce21" office:value-type="string" calcext:value-type="string">
            <text:p>3-72</text:p>
          </table:table-cell>
          <table:table-cell table:style-name="ce21" office:value-type="float" office:value="72" calcext:value-type="float">
            <text:p>72</text:p>
          </table:table-cell>
          <table:table-cell table:style-name="ce11" office:value-type="string" calcext:value-type="string">
            <text:p>怖れの種</text:p>
          </table:table-cell>
          <table:table-cell table:style-name="ce11" table:formula="of:=[.E301]" office:value-type="string" office:string-value="怖れの種" calcext:value-type="string">
            <text:p>怖れの種</text:p>
          </table:table-cell>
          <table:table-cell table:style-name="ce11" office:value-type="string" calcext:value-type="string">
            <text:p>おそれのたね</text:p>
          </table:table-cell>
          <table:table-cell table:style-name="ce11" office:value-type="string" calcext:value-type="string">
            <text:p>第３弾ブースターパック</text:p>
          </table:table-cell>
          <table:table-cell table:style-name="ce11" table:formula="of:=VLOOKUP([.H301];[$収録番号.$A$1:$収録番号.$B$10];2;0)" office:value-type="float" office:value="35" calcext:value-type="float">
            <text:p>35</text:p>
          </table:table-cell>
          <table:table-cell table:style-name="ce11" office:value-type="string" calcext:value-type="string">
            <text:p>N</text:p>
          </table:table-cell>
          <table:table-cell table:style-name="ce11" table:formula="of:=VLOOKUP([.J301];[$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1];[$種類番号.$A$1:$種類番号.$B$4];2;0)" office:value-type="float" office:value="4" calcext:value-type="float">
            <text:p>4</text:p>
          </table:table-cell>
          <table:table-cell table:style-name="ce11" office:value-type="string" calcext:value-type="string">
            <text:p>青</text:p>
          </table:table-cell>
          <table:table-cell table:style-name="ce11" table:formula="of:=VLOOKUP([.N301];[$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01];[$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1];[$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2.png</text:p>
          </table:table-cell>
          <table:table-cell table:style-name="ce11" table:formula="of:=CONCATENATE([$JSON.$A$1];[.$C301];[$JSON.$B$1];[.$E301];[$JSON.$C$1];[.F301];[$JSON.$D$1];[.$G301];[$JSON.$E$1];IF(ISNA([.$T301]);&quot;null&quot;;&quot;&quot;&quot;&quot;&amp;[.$T301]&amp;&quot;&quot;&quot;&quot;);[$JSON.$F$1];[.$V301];[$JSON.$G$1];IF(ISNA([.$X301]);&quot;null&quot;;&quot;&quot;&quot;&quot;&amp;[.$X301]&amp;&quot;&quot;&quot;&quot;);[$JSON.$H$1];[.$AA301];[$JSON.$I$1];[.$I301];[$JSON.$J$1];[.K301];[$JSON.$K$1];[.$M301];[$JSON.$L$1];[.$P301];[$JSON.$M$1];[.$O301];[$JSON.$N$1];[.$S301];[$JSON.$O$1];[.$U301];[$JSON.$P$1];IF(ISNA([.$W301]);&quot;null&quot;;[.$W301]);[$JSON.$Q$1];[.$Y301];[$JSON.$R$1];IF([.$Z301];&quot;true&quot;;&quot;false&quot;);[$JSON.$S$1];[.$A301];[$JSON.$T$1];[.$B301];[$JSON.$U$1])" office:value-type="string" office:string-value="{&quot;id&quot;:&quot;3-72&quot;,&quot;name&quot;:&quot;怖れの種&quot;,&quot;displayName&quot;:&quot;怖れの種&quot;,&quot;kana&quot;:&quot;おそれのたね&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rarity&quot;:1,&quot;type&quot;:4,&quot;level&quot;:1,&quot;color&quot;:2,&quot;term&quot;:0,&quot;trait&quot;:0,&quot;power&quot;:null,&quot;legacy&quot;:1,&quot;anyNumCopies&quot;:false,&quot;orderTable&quot;:300,&quot;orderDeck&quot;:446}," calcext:value-type="string">
            <text:p>{"id":"3-72","name":"怖れの種","displayName":"怖れの種","kana":"おそれのたね","traitText":null,"ruleText":"魔力ゾーンに置かれたとき、自分の山札の上から1枚を裏のまま魔力ゾーンに置く。","legacyText":"魔力化","imageUrl":"https://one-draw.jp/ijinden/cardlist/003/card/03_072.png","expansion":35,"rarity":1,"type":4,"level":1,"color":2,"term":0,"trait":0,"power":null,"legacy":1,"anyNumCopies":false,"orderTable":300,"orderDeck":446},</text:p>
          </table:table-cell>
          <table:table-cell table:number-columns-repeated="16356"/>
        </table:table-row>
        <table:table-row table:style-name="ro2">
          <table:table-cell table:style-name="ce11" office:value-type="float" office:value="301" calcext:value-type="float">
            <text:p>301</text:p>
          </table:table-cell>
          <table:table-cell table:style-name="ce11" office:value-type="float" office:value="453" calcext:value-type="float">
            <text:p>453</text:p>
          </table:table-cell>
          <table:table-cell table:style-name="ce21" office:value-type="string" calcext:value-type="string">
            <text:p>3-73</text:p>
          </table:table-cell>
          <table:table-cell table:style-name="ce21" office:value-type="float" office:value="73" calcext:value-type="float">
            <text:p>73</text:p>
          </table:table-cell>
          <table:table-cell table:style-name="ce11" office:value-type="string" calcext:value-type="string">
            <text:p>怒りの種</text:p>
          </table:table-cell>
          <table:table-cell table:style-name="ce11" table:formula="of:=[.E302]" office:value-type="string" office:string-value="怒りの種" calcext:value-type="string">
            <text:p>怒りの種</text:p>
          </table:table-cell>
          <table:table-cell table:style-name="ce11" office:value-type="string" calcext:value-type="string">
            <text:p>いかりのたね</text:p>
          </table:table-cell>
          <table:table-cell table:style-name="ce11" office:value-type="string" calcext:value-type="string">
            <text:p>第３弾ブースターパック</text:p>
          </table:table-cell>
          <table:table-cell table:style-name="ce11" table:formula="of:=VLOOKUP([.H302];[$収録番号.$A$1:$収録番号.$B$10];2;0)" office:value-type="float" office:value="35" calcext:value-type="float">
            <text:p>35</text:p>
          </table:table-cell>
          <table:table-cell table:style-name="ce11" office:value-type="string" calcext:value-type="string">
            <text:p>N</text:p>
          </table:table-cell>
          <table:table-cell table:style-name="ce11" table:formula="of:=VLOOKUP([.J30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2];[$種類番号.$A$1:$種類番号.$B$4];2;0)" office:value-type="float" office:value="4" calcext:value-type="float">
            <text:p>4</text:p>
          </table:table-cell>
          <table:table-cell table:style-name="ce11" office:value-type="string" calcext:value-type="string">
            <text:p>緑</text:p>
          </table:table-cell>
          <table:table-cell table:style-name="ce11" table:formula="of:=VLOOKUP([.N302];[$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02];[$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3.png</text:p>
          </table:table-cell>
          <table:table-cell table:style-name="ce11" table:formula="of:=CONCATENATE([$JSON.$A$1];[.$C302];[$JSON.$B$1];[.$E302];[$JSON.$C$1];[.F302];[$JSON.$D$1];[.$G302];[$JSON.$E$1];IF(ISNA([.$T302]);&quot;null&quot;;&quot;&quot;&quot;&quot;&amp;[.$T302]&amp;&quot;&quot;&quot;&quot;);[$JSON.$F$1];[.$V302];[$JSON.$G$1];IF(ISNA([.$X302]);&quot;null&quot;;&quot;&quot;&quot;&quot;&amp;[.$X302]&amp;&quot;&quot;&quot;&quot;);[$JSON.$H$1];[.$AA302];[$JSON.$I$1];[.$I302];[$JSON.$J$1];[.K302];[$JSON.$K$1];[.$M302];[$JSON.$L$1];[.$P302];[$JSON.$M$1];[.$O302];[$JSON.$N$1];[.$S302];[$JSON.$O$1];[.$U302];[$JSON.$P$1];IF(ISNA([.$W302]);&quot;null&quot;;[.$W302]);[$JSON.$Q$1];[.$Y302];[$JSON.$R$1];IF([.$Z302];&quot;true&quot;;&quot;false&quot;);[$JSON.$S$1];[.$A302];[$JSON.$T$1];[.$B302];[$JSON.$U$1])" office:value-type="string" office:string-value="{&quot;id&quot;:&quot;3-73&quot;,&quot;name&quot;:&quot;怒りの種&quot;,&quot;displayName&quot;:&quot;怒りの種&quot;,&quot;kana&quot;:&quot;いかりのたね&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rarity&quot;:1,&quot;type&quot;:4,&quot;level&quot;:1,&quot;color&quot;:4,&quot;term&quot;:0,&quot;trait&quot;:0,&quot;power&quot;:null,&quot;legacy&quot;:1,&quot;anyNumCopies&quot;:false,&quot;orderTable&quot;:301,&quot;orderDeck&quot;:453}," calcext:value-type="string">
            <text:p>{"id":"3-73","name":"怒りの種","displayName":"怒りの種","kana":"いかりのたね","traitText":null,"ruleText":"魔力ゾーンに置かれたとき、自分の山札の上から1枚を裏のまま魔力ゾーンに置く。","legacyText":"魔力化","imageUrl":"https://one-draw.jp/ijinden/cardlist/003/card/03_073.png","expansion":35,"rarity":1,"type":4,"level":1,"color":4,"term":0,"trait":0,"power":null,"legacy":1,"anyNumCopies":false,"orderTable":301,"orderDeck":453},</text:p>
          </table:table-cell>
          <table:table-cell table:number-columns-repeated="16356"/>
        </table:table-row>
        <table:table-row table:style-name="ro2">
          <table:table-cell table:style-name="ce11" office:value-type="float" office:value="302" calcext:value-type="float">
            <text:p>302</text:p>
          </table:table-cell>
          <table:table-cell table:style-name="ce11" office:value-type="float" office:value="459" calcext:value-type="float">
            <text:p>459</text:p>
          </table:table-cell>
          <table:table-cell table:style-name="ce21" office:value-type="string" calcext:value-type="string">
            <text:p>3-74</text:p>
          </table:table-cell>
          <table:table-cell table:style-name="ce21" office:value-type="float" office:value="74" calcext:value-type="float">
            <text:p>74</text:p>
          </table:table-cell>
          <table:table-cell table:style-name="ce11" office:value-type="string" calcext:value-type="string">
            <text:p>苦しみの種</text:p>
          </table:table-cell>
          <table:table-cell table:style-name="ce11" table:formula="of:=[.E303]" office:value-type="string" office:string-value="苦しみの種" calcext:value-type="string">
            <text:p>苦しみの種</text:p>
          </table:table-cell>
          <table:table-cell table:style-name="ce11" office:value-type="string" calcext:value-type="string">
            <text:p>くるしみのたね</text:p>
          </table:table-cell>
          <table:table-cell table:style-name="ce11" office:value-type="string" calcext:value-type="string">
            <text:p>第３弾ブースターパック</text:p>
          </table:table-cell>
          <table:table-cell table:style-name="ce11" table:formula="of:=VLOOKUP([.H303];[$収録番号.$A$1:$収録番号.$B$10];2;0)" office:value-type="float" office:value="35" calcext:value-type="float">
            <text:p>35</text:p>
          </table:table-cell>
          <table:table-cell table:style-name="ce11" office:value-type="string" calcext:value-type="string">
            <text:p>N</text:p>
          </table:table-cell>
          <table:table-cell table:style-name="ce11" table:formula="of:=VLOOKUP([.J30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3];[$種類番号.$A$1:$種類番号.$B$4];2;0)" office:value-type="float" office:value="4" calcext:value-type="float">
            <text:p>4</text:p>
          </table:table-cell>
          <table:table-cell table:style-name="ce11" office:value-type="string" calcext:value-type="string">
            <text:p>黄</text:p>
          </table:table-cell>
          <table:table-cell table:style-name="ce11" table:formula="of:=VLOOKUP([.N303];[$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03];[$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3];[$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4.png</text:p>
          </table:table-cell>
          <table:table-cell table:style-name="ce11" table:formula="of:=CONCATENATE([$JSON.$A$1];[.$C303];[$JSON.$B$1];[.$E303];[$JSON.$C$1];[.F303];[$JSON.$D$1];[.$G303];[$JSON.$E$1];IF(ISNA([.$T303]);&quot;null&quot;;&quot;&quot;&quot;&quot;&amp;[.$T303]&amp;&quot;&quot;&quot;&quot;);[$JSON.$F$1];[.$V303];[$JSON.$G$1];IF(ISNA([.$X303]);&quot;null&quot;;&quot;&quot;&quot;&quot;&amp;[.$X303]&amp;&quot;&quot;&quot;&quot;);[$JSON.$H$1];[.$AA303];[$JSON.$I$1];[.$I303];[$JSON.$J$1];[.K303];[$JSON.$K$1];[.$M303];[$JSON.$L$1];[.$P303];[$JSON.$M$1];[.$O303];[$JSON.$N$1];[.$S303];[$JSON.$O$1];[.$U303];[$JSON.$P$1];IF(ISNA([.$W303]);&quot;null&quot;;[.$W303]);[$JSON.$Q$1];[.$Y303];[$JSON.$R$1];IF([.$Z303];&quot;true&quot;;&quot;false&quot;);[$JSON.$S$1];[.$A303];[$JSON.$T$1];[.$B303];[$JSON.$U$1])" office:value-type="string" office:string-value="{&quot;id&quot;:&quot;3-74&quot;,&quot;name&quot;:&quot;苦しみの種&quot;,&quot;displayName&quot;:&quot;苦しみの種&quot;,&quot;kana&quot;:&quot;くるしみのたね&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rarity&quot;:1,&quot;type&quot;:4,&quot;level&quot;:1,&quot;color&quot;:8,&quot;term&quot;:0,&quot;trait&quot;:0,&quot;power&quot;:null,&quot;legacy&quot;:1,&quot;anyNumCopies&quot;:false,&quot;orderTable&quot;:302,&quot;orderDeck&quot;:459}," calcext:value-type="string">
            <text:p>{"id":"3-74","name":"苦しみの種","displayName":"苦しみの種","kana":"くるしみのたね","traitText":null,"ruleText":"魔力ゾーンに置かれたとき、自分の山札の上から1枚を裏のまま魔力ゾーンに置く。","legacyText":"魔力化","imageUrl":"https://one-draw.jp/ijinden/cardlist/003/card/03_074.png","expansion":35,"rarity":1,"type":4,"level":1,"color":8,"term":0,"trait":0,"power":null,"legacy":1,"anyNumCopies":false,"orderTable":302,"orderDeck":459},</text:p>
          </table:table-cell>
          <table:table-cell table:number-columns-repeated="16356"/>
        </table:table-row>
        <table:table-row table:style-name="ro2">
          <table:table-cell table:style-name="ce11" office:value-type="float" office:value="303" calcext:value-type="float">
            <text:p>303</text:p>
          </table:table-cell>
          <table:table-cell table:style-name="ce11" office:value-type="float" office:value="465" calcext:value-type="float">
            <text:p>465</text:p>
          </table:table-cell>
          <table:table-cell table:style-name="ce21" office:value-type="string" calcext:value-type="string">
            <text:p>3-75</text:p>
          </table:table-cell>
          <table:table-cell table:style-name="ce21" office:value-type="float" office:value="75" calcext:value-type="float">
            <text:p>75</text:p>
          </table:table-cell>
          <table:table-cell table:style-name="ce11" office:value-type="string" calcext:value-type="string">
            <text:p>悲しみの種</text:p>
          </table:table-cell>
          <table:table-cell table:style-name="ce11" table:formula="of:=[.E304]" office:value-type="string" office:string-value="悲しみの種" calcext:value-type="string">
            <text:p>悲しみの種</text:p>
          </table:table-cell>
          <table:table-cell table:style-name="ce11" office:value-type="string" calcext:value-type="string">
            <text:p>かなしみのたね</text:p>
          </table:table-cell>
          <table:table-cell table:style-name="ce11" office:value-type="string" calcext:value-type="string">
            <text:p>第３弾ブースターパック</text:p>
          </table:table-cell>
          <table:table-cell table:style-name="ce11" table:formula="of:=VLOOKUP([.H304];[$収録番号.$A$1:$収録番号.$B$10];2;0)" office:value-type="float" office:value="35" calcext:value-type="float">
            <text:p>35</text:p>
          </table:table-cell>
          <table:table-cell table:style-name="ce11" office:value-type="string" calcext:value-type="string">
            <text:p>N</text:p>
          </table:table-cell>
          <table:table-cell table:style-name="ce11" table:formula="of:=VLOOKUP([.J30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4];[$種類番号.$A$1:$種類番号.$B$4];2;0)" office:value-type="float" office:value="4" calcext:value-type="float">
            <text:p>4</text:p>
          </table:table-cell>
          <table:table-cell table:style-name="ce11" office:value-type="string" calcext:value-type="string">
            <text:p>紫</text:p>
          </table:table-cell>
          <table:table-cell table:style-name="ce11" table:formula="of:=VLOOKUP([.N304];[$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04];[$特性番号.$A$1:$特性番号.$B$8];2;0);0)" office:value-type="float" office:value="0" calcext:value-type="float">
            <text:p>0</text:p>
          </table:table-cell>
          <table:table-cell table:style-name="ce11" office:value-type="string" calcext:value-type="string">
            <text:p>魔力ゾーンに置かれたとき、自分の山札の上から1枚を裏のまま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4];[$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5.png</text:p>
          </table:table-cell>
          <table:table-cell table:style-name="ce11" table:formula="of:=CONCATENATE([$JSON.$A$1];[.$C304];[$JSON.$B$1];[.$E304];[$JSON.$C$1];[.F304];[$JSON.$D$1];[.$G304];[$JSON.$E$1];IF(ISNA([.$T304]);&quot;null&quot;;&quot;&quot;&quot;&quot;&amp;[.$T304]&amp;&quot;&quot;&quot;&quot;);[$JSON.$F$1];[.$V304];[$JSON.$G$1];IF(ISNA([.$X304]);&quot;null&quot;;&quot;&quot;&quot;&quot;&amp;[.$X304]&amp;&quot;&quot;&quot;&quot;);[$JSON.$H$1];[.$AA304];[$JSON.$I$1];[.$I304];[$JSON.$J$1];[.K304];[$JSON.$K$1];[.$M304];[$JSON.$L$1];[.$P304];[$JSON.$M$1];[.$O304];[$JSON.$N$1];[.$S304];[$JSON.$O$1];[.$U304];[$JSON.$P$1];IF(ISNA([.$W304]);&quot;null&quot;;[.$W304]);[$JSON.$Q$1];[.$Y304];[$JSON.$R$1];IF([.$Z304];&quot;true&quot;;&quot;false&quot;);[$JSON.$S$1];[.$A304];[$JSON.$T$1];[.$B304];[$JSON.$U$1])" office:value-type="string" office:string-value="{&quot;id&quot;:&quot;3-75&quot;,&quot;name&quot;:&quot;悲しみの種&quot;,&quot;displayName&quot;:&quot;悲しみの種&quot;,&quot;kana&quot;:&quot;かなしみのたね&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rarity&quot;:1,&quot;type&quot;:4,&quot;level&quot;:1,&quot;color&quot;:16,&quot;term&quot;:0,&quot;trait&quot;:0,&quot;power&quot;:null,&quot;legacy&quot;:1,&quot;anyNumCopies&quot;:false,&quot;orderTable&quot;:303,&quot;orderDeck&quot;:465}," calcext:value-type="string">
            <text:p>{"id":"3-75","name":"悲しみの種","displayName":"悲しみの種","kana":"かなしみのたね","traitText":null,"ruleText":"魔力ゾーンに置かれたとき、自分の山札の上から1枚を裏のまま魔力ゾーンに置く。","legacyText":"魔力化","imageUrl":"https://one-draw.jp/ijinden/cardlist/003/card/03_075.png","expansion":35,"rarity":1,"type":4,"level":1,"color":16,"term":0,"trait":0,"power":null,"legacy":1,"anyNumCopies":false,"orderTable":303,"orderDeck":465},</text:p>
          </table:table-cell>
          <table:table-cell table:number-columns-repeated="16356"/>
        </table:table-row>
        <table:table-row table:style-name="ro2">
          <table:table-cell table:style-name="ce11" office:value-type="float" office:value="304" calcext:value-type="float">
            <text:p>304</text:p>
          </table:table-cell>
          <table:table-cell table:style-name="ce11" office:value-type="float" office:value="466" calcext:value-type="float">
            <text:p>466</text:p>
          </table:table-cell>
          <table:table-cell table:style-name="ce21" office:value-type="string" calcext:value-type="string">
            <text:p>3-76</text:p>
          </table:table-cell>
          <table:table-cell table:style-name="ce21" office:value-type="float" office:value="76" calcext:value-type="float">
            <text:p>76</text:p>
          </table:table-cell>
          <table:table-cell table:style-name="ce11" office:value-type="string" calcext:value-type="string">
            <text:p>ダンダラ羽織</text:p>
          </table:table-cell>
          <table:table-cell table:style-name="ce11" table:formula="of:=[.E305]" office:value-type="string" office:string-value="ダンダラ羽織" calcext:value-type="string">
            <text:p>ダンダラ羽織</text:p>
          </table:table-cell>
          <table:table-cell table:style-name="ce11" office:value-type="string" calcext:value-type="string">
            <text:p>だんだらばおり</text:p>
          </table:table-cell>
          <table:table-cell table:style-name="ce11" office:value-type="string" calcext:value-type="string">
            <text:p>第３弾ブースターパック</text:p>
          </table:table-cell>
          <table:table-cell table:style-name="ce11" table:formula="of:=VLOOKUP([.H305];[$収録番号.$A$1:$収録番号.$B$10];2;0)" office:value-type="float" office:value="35" calcext:value-type="float">
            <text:p>35</text:p>
          </table:table-cell>
          <table:table-cell table:style-name="ce11" office:value-type="string" calcext:value-type="string">
            <text:p>N</text:p>
          </table:table-cell>
          <table:table-cell table:style-name="ce11" table:formula="of:=VLOOKUP([.J30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5];[$種類番号.$A$1:$種類番号.$B$4];2;0)" office:value-type="float" office:value="4" calcext:value-type="float">
            <text:p>4</text:p>
          </table:table-cell>
          <table:table-cell table:style-name="ce11" office:value-type="string" calcext:value-type="string">
            <text:p>紫</text:p>
          </table:table-cell>
          <table:table-cell table:style-name="ce11" table:formula="of:=VLOOKUP([.N305];[$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05];[$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05];[$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6.png</text:p>
          </table:table-cell>
          <table:table-cell table:style-name="ce11" table:formula="of:=CONCATENATE([$JSON.$A$1];[.$C305];[$JSON.$B$1];[.$E305];[$JSON.$C$1];[.F305];[$JSON.$D$1];[.$G305];[$JSON.$E$1];IF(ISNA([.$T305]);&quot;null&quot;;&quot;&quot;&quot;&quot;&amp;[.$T305]&amp;&quot;&quot;&quot;&quot;);[$JSON.$F$1];[.$V305];[$JSON.$G$1];IF(ISNA([.$X305]);&quot;null&quot;;&quot;&quot;&quot;&quot;&amp;[.$X305]&amp;&quot;&quot;&quot;&quot;);[$JSON.$H$1];[.$AA305];[$JSON.$I$1];[.$I305];[$JSON.$J$1];[.K305];[$JSON.$K$1];[.$M305];[$JSON.$L$1];[.$P305];[$JSON.$M$1];[.$O305];[$JSON.$N$1];[.$S305];[$JSON.$O$1];[.$U305];[$JSON.$P$1];IF(ISNA([.$W305]);&quot;null&quot;;[.$W305]);[$JSON.$Q$1];[.$Y305];[$JSON.$R$1];IF([.$Z305];&quot;true&quot;;&quot;false&quot;);[$JSON.$S$1];[.$A305];[$JSON.$T$1];[.$B305];[$JSON.$U$1])" office:value-type="string" office:string-value="{&quot;id&quot;:&quot;3-76&quot;,&quot;name&quot;:&quot;ダンダラ羽織&quot;,&quot;displayName&quot;:&quot;ダンダラ羽織&quot;,&quot;kana&quot;:&quot;だんだらばおり&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rarity&quot;:1,&quot;type&quot;:4,&quot;level&quot;:1,&quot;color&quot;:16,&quot;term&quot;:0,&quot;trait&quot;:0,&quot;power&quot;:null,&quot;legacy&quot;:3,&quot;anyNumCopies&quot;:false,&quot;orderTable&quot;:304,&quot;orderDeck&quot;:466}," calcext:value-type="string">
            <text:p>{"id":"3-76","name":"ダンダラ羽織","displayName":"ダンダラ羽織","kana":"だんだらばおり","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rarity":1,"type":4,"level":1,"color":16,"term":0,"trait":0,"power":null,"legacy":3,"anyNumCopies":false,"orderTable":304,"orderDeck":466},</text:p>
          </table:table-cell>
          <table:table-cell table:number-columns-repeated="16356"/>
        </table:table-row>
        <table:table-row table:style-name="ro2">
          <table:table-cell table:style-name="ce11" office:value-type="float" office:value="305" calcext:value-type="float">
            <text:p>305</text:p>
          </table:table-cell>
          <table:table-cell table:style-name="ce11" office:value-type="float" office:value="434" calcext:value-type="float">
            <text:p>434</text:p>
          </table:table-cell>
          <table:table-cell table:style-name="ce21" office:value-type="string" calcext:value-type="string">
            <text:p>3-77</text:p>
          </table:table-cell>
          <table:table-cell table:style-name="ce21" office:value-type="float" office:value="77" calcext:value-type="float">
            <text:p>77</text:p>
          </table:table-cell>
          <table:table-cell table:style-name="ce11" office:value-type="string" calcext:value-type="string">
            <text:p>遁甲盤</text:p>
          </table:table-cell>
          <table:table-cell table:style-name="ce11" table:formula="of:=[.E306]" office:value-type="string" office:string-value="遁甲盤" calcext:value-type="string">
            <text:p>遁甲盤</text:p>
          </table:table-cell>
          <table:table-cell table:style-name="ce11" office:value-type="string" calcext:value-type="string">
            <text:p>とんこうばん</text:p>
          </table:table-cell>
          <table:table-cell table:style-name="ce11" office:value-type="string" calcext:value-type="string">
            <text:p>第３弾ブースターパック</text:p>
          </table:table-cell>
          <table:table-cell table:style-name="ce11" table:formula="of:=VLOOKUP([.H306];[$収録番号.$A$1:$収録番号.$B$10];2;0)" office:value-type="float" office:value="35" calcext:value-type="float">
            <text:p>35</text:p>
          </table:table-cell>
          <table:table-cell table:style-name="ce11" office:value-type="string" calcext:value-type="string">
            <text:p>N</text:p>
          </table:table-cell>
          <table:table-cell table:style-name="ce11" table:formula="of:=VLOOKUP([.J30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6];[$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6];[$色番号.$A$1:$色番号.$B$10];2;0)" office:value-type="float" office:value="64" calcext:value-type="float">
            <text:p>6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06];[$特性番号.$A$1:$特性番号.$B$8];2;0);0)" office:value-type="float" office:value="0" calcext:value-type="float">
            <text:p>0</text:p>
          </table:table-cell>
          <table:table-cell table:style-name="ce11"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06];[$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7.png</text:p>
          </table:table-cell>
          <table:table-cell table:style-name="ce11" table:formula="of:=CONCATENATE([$JSON.$A$1];[.$C306];[$JSON.$B$1];[.$E306];[$JSON.$C$1];[.F306];[$JSON.$D$1];[.$G306];[$JSON.$E$1];IF(ISNA([.$T306]);&quot;null&quot;;&quot;&quot;&quot;&quot;&amp;[.$T306]&amp;&quot;&quot;&quot;&quot;);[$JSON.$F$1];[.$V306];[$JSON.$G$1];IF(ISNA([.$X306]);&quot;null&quot;;&quot;&quot;&quot;&quot;&amp;[.$X306]&amp;&quot;&quot;&quot;&quot;);[$JSON.$H$1];[.$AA306];[$JSON.$I$1];[.$I306];[$JSON.$J$1];[.K306];[$JSON.$K$1];[.$M306];[$JSON.$L$1];[.$P306];[$JSON.$M$1];[.$O306];[$JSON.$N$1];[.$S306];[$JSON.$O$1];[.$U306];[$JSON.$P$1];IF(ISNA([.$W306]);&quot;null&quot;;[.$W306]);[$JSON.$Q$1];[.$Y306];[$JSON.$R$1];IF([.$Z306];&quot;true&quot;;&quot;false&quot;);[$JSON.$S$1];[.$A306];[$JSON.$T$1];[.$B306];[$JSON.$U$1])" office:value-type="string" office:string-value="{&quot;id&quot;:&quot;3-77&quot;,&quot;name&quot;:&quot;遁甲盤&quot;,&quot;displayName&quot;:&quot;遁甲盤&quot;,&quot;kana&quot;:&quot;とんこうばん&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rarity&quot;:1,&quot;type&quot;:4,&quot;level&quot;:0,&quot;color&quot;:64,&quot;term&quot;:0,&quot;trait&quot;:0,&quot;power&quot;:null,&quot;legacy&quot;:5,&quot;anyNumCopies&quot;:false,&quot;orderTable&quot;:305,&quot;orderDeck&quot;:434}," calcext:value-type="string">
            <text:p>{"id":"3-77","name":"遁甲盤","displayName":"遁甲盤","kana":"とんこうばん","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rarity":1,"type":4,"level":0,"color":64,"term":0,"trait":0,"power":null,"legacy":5,"anyNumCopies":false,"orderTable":305,"orderDeck":434},</text:p>
          </table:table-cell>
          <table:table-cell table:number-columns-repeated="16356"/>
        </table:table-row>
        <table:table-row table:style-name="ro2">
          <table:table-cell table:style-name="ce11" office:value-type="float" office:value="306" calcext:value-type="float">
            <text:p>306</text:p>
          </table:table-cell>
          <table:table-cell table:style-name="ce11" office:value-type="float" office:value="472" calcext:value-type="float">
            <text:p>472</text:p>
          </table:table-cell>
          <table:table-cell table:style-name="ce21" office:value-type="string" calcext:value-type="string">
            <text:p>3-78</text:p>
          </table:table-cell>
          <table:table-cell table:style-name="ce21" office:value-type="float" office:value="78" calcext:value-type="float">
            <text:p>78</text:p>
          </table:table-cell>
          <table:table-cell table:style-name="ce11" office:value-type="string" calcext:value-type="string">
            <text:p>ホムンクルス</text:p>
          </table:table-cell>
          <table:table-cell table:style-name="ce11" table:formula="of:=[.E307]" office:value-type="string" office:string-value="ホムンクルス" calcext:value-type="string">
            <text:p>ホムンクルス</text:p>
          </table:table-cell>
          <table:table-cell table:style-name="ce11" office:value-type="string" calcext:value-type="string">
            <text:p>ほむんくるす</text:p>
          </table:table-cell>
          <table:table-cell table:style-name="ce11" office:value-type="string" calcext:value-type="string">
            <text:p>第３弾ブースターパック</text:p>
          </table:table-cell>
          <table:table-cell table:style-name="ce11" table:formula="of:=VLOOKUP([.H307];[$収録番号.$A$1:$収録番号.$B$10];2;0)" office:value-type="float" office:value="35" calcext:value-type="float">
            <text:p>35</text:p>
          </table:table-cell>
          <table:table-cell table:style-name="ce11" office:value-type="string" calcext:value-type="string">
            <text:p>N</text:p>
          </table:table-cell>
          <table:table-cell table:style-name="ce11" table:formula="of:=VLOOKUP([.J30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7];[$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7];[$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07];[$特性番号.$A$1:$特性番号.$B$8];2;0);0)" office:value-type="float" office:value="0" calcext:value-type="float">
            <text:p>0</text:p>
          </table:table-cell>
          <table:table-cell table:style-name="ce11"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07];[$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8.png</text:p>
          </table:table-cell>
          <table:table-cell table:style-name="ce11" table:formula="of:=CONCATENATE([$JSON.$A$1];[.$C307];[$JSON.$B$1];[.$E307];[$JSON.$C$1];[.F307];[$JSON.$D$1];[.$G307];[$JSON.$E$1];IF(ISNA([.$T307]);&quot;null&quot;;&quot;&quot;&quot;&quot;&amp;[.$T307]&amp;&quot;&quot;&quot;&quot;);[$JSON.$F$1];[.$V307];[$JSON.$G$1];IF(ISNA([.$X307]);&quot;null&quot;;&quot;&quot;&quot;&quot;&amp;[.$X307]&amp;&quot;&quot;&quot;&quot;);[$JSON.$H$1];[.$AA307];[$JSON.$I$1];[.$I307];[$JSON.$J$1];[.K307];[$JSON.$K$1];[.$M307];[$JSON.$L$1];[.$P307];[$JSON.$M$1];[.$O307];[$JSON.$N$1];[.$S307];[$JSON.$O$1];[.$U307];[$JSON.$P$1];IF(ISNA([.$W307]);&quot;null&quot;;[.$W307]);[$JSON.$Q$1];[.$Y307];[$JSON.$R$1];IF([.$Z307];&quot;true&quot;;&quot;false&quot;);[$JSON.$S$1];[.$A307];[$JSON.$T$1];[.$B307];[$JSON.$U$1])" office:value-type="string" office:string-value="{&quot;id&quot;:&quot;3-78&quot;,&quot;name&quot;:&quot;ホムンクルス&quot;,&quot;displayName&quot;:&quot;ホムンクルス&quot;,&quot;kana&quot;:&quot;ほむんくるす&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rarity&quot;:1,&quot;type&quot;:4,&quot;level&quot;:1,&quot;color&quot;:64,&quot;term&quot;:0,&quot;trait&quot;:0,&quot;power&quot;:null,&quot;legacy&quot;:0,&quot;anyNumCopies&quot;:false,&quot;orderTable&quot;:306,&quot;orderDeck&quot;:472}," calcext:value-type="string">
            <text:p>{"id":"3-78","name":"ホムンクルス","displayName":"ホムンクルス","kana":"ほむんくるす","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rarity":1,"type":4,"level":1,"color":64,"term":0,"trait":0,"power":null,"legacy":0,"anyNumCopies":false,"orderTable":306,"orderDeck":472},</text:p>
          </table:table-cell>
          <table:table-cell table:number-columns-repeated="16356"/>
        </table:table-row>
        <table:table-row table:style-name="ro2">
          <table:table-cell table:style-name="ce11" office:value-type="float" office:value="307" calcext:value-type="float">
            <text:p>307</text:p>
          </table:table-cell>
          <table:table-cell table:style-name="ce11" office:value-type="float" office:value="473" calcext:value-type="float">
            <text:p>473</text:p>
          </table:table-cell>
          <table:table-cell table:style-name="ce21" office:value-type="string" calcext:value-type="string">
            <text:p>3-79</text:p>
          </table:table-cell>
          <table:table-cell table:style-name="ce21" office:value-type="float" office:value="79" calcext:value-type="float">
            <text:p>79</text:p>
          </table:table-cell>
          <table:table-cell table:style-name="ce11" office:value-type="string" calcext:value-type="string">
            <text:p>ストーンマスク</text:p>
          </table:table-cell>
          <table:table-cell table:style-name="ce11" table:formula="of:=[.E308]" office:value-type="string" office:string-value="ストーンマスク" calcext:value-type="string">
            <text:p>ストーンマスク</text:p>
          </table:table-cell>
          <table:table-cell table:style-name="ce11" office:value-type="string" calcext:value-type="string">
            <text:p>すとーんますく</text:p>
          </table:table-cell>
          <table:table-cell table:style-name="ce11" office:value-type="string" calcext:value-type="string">
            <text:p>第３弾ブースターパック</text:p>
          </table:table-cell>
          <table:table-cell table:style-name="ce11" table:formula="of:=VLOOKUP([.H308];[$収録番号.$A$1:$収録番号.$B$10];2;0)" office:value-type="float" office:value="35" calcext:value-type="float">
            <text:p>35</text:p>
          </table:table-cell>
          <table:table-cell table:style-name="ce11" office:value-type="string" calcext:value-type="string">
            <text:p>N</text:p>
          </table:table-cell>
          <table:table-cell table:style-name="ce11" table:formula="of:=VLOOKUP([.J30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08];[$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8];[$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08];[$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戦場に置かれたとき、1ドロー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0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79.png</text:p>
          </table:table-cell>
          <table:table-cell table:style-name="ce11" table:formula="of:=CONCATENATE([$JSON.$A$1];[.$C308];[$JSON.$B$1];[.$E308];[$JSON.$C$1];[.F308];[$JSON.$D$1];[.$G308];[$JSON.$E$1];IF(ISNA([.$T308]);&quot;null&quot;;&quot;&quot;&quot;&quot;&amp;[.$T308]&amp;&quot;&quot;&quot;&quot;);[$JSON.$F$1];[.$V308];[$JSON.$G$1];IF(ISNA([.$X308]);&quot;null&quot;;&quot;&quot;&quot;&quot;&amp;[.$X308]&amp;&quot;&quot;&quot;&quot;);[$JSON.$H$1];[.$AA308];[$JSON.$I$1];[.$I308];[$JSON.$J$1];[.K308];[$JSON.$K$1];[.$M308];[$JSON.$L$1];[.$P308];[$JSON.$M$1];[.$O308];[$JSON.$N$1];[.$S308];[$JSON.$O$1];[.$U308];[$JSON.$P$1];IF(ISNA([.$W308]);&quot;null&quot;;[.$W308]);[$JSON.$Q$1];[.$Y308];[$JSON.$R$1];IF([.$Z308];&quot;true&quot;;&quot;false&quot;);[$JSON.$S$1];[.$A308];[$JSON.$T$1];[.$B308];[$JSON.$U$1])" office:value-type="string" office:string-value="{&quot;id&quot;:&quot;3-79&quot;,&quot;name&quot;:&quot;ストーンマスク&quot;,&quot;displayName&quot;:&quot;ストーンマスク&quot;,&quot;kana&quot;:&quot;すとーんますく&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rarity&quot;:1,&quot;type&quot;:4,&quot;level&quot;:1,&quot;color&quot;:64,&quot;term&quot;:0,&quot;trait&quot;:0,&quot;power&quot;:null,&quot;legacy&quot;:3,&quot;anyNumCopies&quot;:false,&quot;orderTable&quot;:307,&quot;orderDeck&quot;:473}," calcext:value-type="string">
            <text:p>{"id":"3-79","name":"ストーンマスク","displayName":"ストーンマスク","kana":"すとーんますく","traitText":null,"ruleText":"イジン召喚によってイジンが自分の戦場に置かれる際、そのイジンに装備させてもよい。¶装備 : 戦場に置かれたとき、1ドローする。","legacyText":"復元","imageUrl":"https://one-draw.jp/ijinden/cardlist/003/card/03_079.png","expansion":35,"rarity":1,"type":4,"level":1,"color":64,"term":0,"trait":0,"power":null,"legacy":3,"anyNumCopies":false,"orderTable":307,"orderDeck":473},</text:p>
          </table:table-cell>
          <table:table-cell table:number-columns-repeated="16356"/>
        </table:table-row>
        <table:table-row table:style-name="ro2">
          <table:table-cell table:style-name="ce11" office:value-type="float" office:value="308" calcext:value-type="float">
            <text:p>308</text:p>
          </table:table-cell>
          <table:table-cell table:style-name="ce11" office:value-type="float" office:value="501" calcext:value-type="float">
            <text:p>501</text:p>
          </table:table-cell>
          <table:table-cell table:style-name="ce21" office:value-type="string" calcext:value-type="string">
            <text:p>3-80</text:p>
          </table:table-cell>
          <table:table-cell table:style-name="ce21" office:value-type="float" office:value="80" calcext:value-type="float">
            <text:p>80</text:p>
          </table:table-cell>
          <table:table-cell table:style-name="ce11" office:value-type="string" calcext:value-type="string">
            <text:p>オブシディアン</text:p>
          </table:table-cell>
          <table:table-cell table:style-name="ce11" table:formula="of:=[.E309]" office:value-type="string" office:string-value="オブシディアン" calcext:value-type="string">
            <text:p>オブシディアン</text:p>
          </table:table-cell>
          <table:table-cell table:style-name="ce11" office:value-type="string" calcext:value-type="string">
            <text:p>おぶしでぃあん</text:p>
          </table:table-cell>
          <table:table-cell table:style-name="ce11" office:value-type="string" calcext:value-type="string">
            <text:p>第３弾ブースターパック</text:p>
          </table:table-cell>
          <table:table-cell table:style-name="ce11" table:formula="of:=VLOOKUP([.H309];[$収録番号.$A$1:$収録番号.$B$10];2;0)" office:value-type="float" office:value="35" calcext:value-type="float">
            <text:p>35</text:p>
          </table:table-cell>
          <table:table-cell table:style-name="ce11" office:value-type="string" calcext:value-type="string">
            <text:p>R</text:p>
          </table:table-cell>
          <table:table-cell table:style-name="ce11" table:formula="of:=VLOOKUP([.J309];[$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09];[$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09];[$色番号.$A$1:$色番号.$B$10];2;0)" office:value-type="float" office:value="64" calcext:value-type="float">
            <text:p>6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0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09];[$特性番号.$A$1:$特性番号.$B$8];2;0);0)" office:value-type="float" office:value="0" calcext:value-type="float">
            <text:p>0</text:p>
          </table:table-cell>
          <table:table-cell table:style-name="ce11"/>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0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3/card/03_080.png</text:p>
          </table:table-cell>
          <table:table-cell table:style-name="ce11" table:formula="of:=CONCATENATE([$JSON.$A$1];[.$C309];[$JSON.$B$1];[.$E309];[$JSON.$C$1];[.F309];[$JSON.$D$1];[.$G309];[$JSON.$E$1];IF(ISNA([.$T309]);&quot;null&quot;;&quot;&quot;&quot;&quot;&amp;[.$T309]&amp;&quot;&quot;&quot;&quot;);[$JSON.$F$1];[.$V309];[$JSON.$G$1];IF(ISNA([.$X309]);&quot;null&quot;;&quot;&quot;&quot;&quot;&amp;[.$X309]&amp;&quot;&quot;&quot;&quot;);[$JSON.$H$1];[.$AA309];[$JSON.$I$1];[.$I309];[$JSON.$J$1];[.K309];[$JSON.$K$1];[.$M309];[$JSON.$L$1];[.$P309];[$JSON.$M$1];[.$O309];[$JSON.$N$1];[.$S309];[$JSON.$O$1];[.$U309];[$JSON.$P$1];IF(ISNA([.$W309]);&quot;null&quot;;[.$W309]);[$JSON.$Q$1];[.$Y309];[$JSON.$R$1];IF([.$Z309];&quot;true&quot;;&quot;false&quot;);[$JSON.$S$1];[.$A309];[$JSON.$T$1];[.$B309];[$JSON.$U$1])" office:value-type="string" office:string-value="{&quot;id&quot;:&quot;3-80&quot;,&quot;name&quot;:&quot;オブシディアン&quot;,&quot;displayName&quot;:&quot;オブシディアン&quot;,&quot;kana&quot;:&quot;おぶしでぃあん&quot;,&quot;traitText&quot;:null,&quot;ruleText&quot;:&quot;&quot;,&quot;legacyText&quot;:&quot;魔力化&quot;,&quot;imageUrl&quot;:&quot;https://one-draw.jp/ijinden/cardlist/003/card/03_080.png&quot;,&quot;expansion&quot;:35,&quot;rarity&quot;:2,&quot;type&quot;:4,&quot;level&quot;:3,&quot;color&quot;:64,&quot;term&quot;:0,&quot;trait&quot;:0,&quot;power&quot;:null,&quot;legacy&quot;:1,&quot;anyNumCopies&quot;:false,&quot;orderTable&quot;:308,&quot;orderDeck&quot;:501}," calcext:value-type="string">
            <text:p>{"id":"3-80","name":"オブシディアン","displayName":"オブシディアン","kana":"おぶしでぃあん","traitText":null,"ruleText":"","legacyText":"魔力化","imageUrl":"https://one-draw.jp/ijinden/cardlist/003/card/03_080.png","expansion":35,"rarity":2,"type":4,"level":3,"color":64,"term":0,"trait":0,"power":null,"legacy":1,"anyNumCopies":false,"orderTable":308,"orderDeck":501},</text:p>
          </table:table-cell>
          <table:table-cell table:number-columns-repeated="16356"/>
        </table:table-row>
        <table:table-row table:style-name="ro2">
          <table:table-cell table:style-name="ce11" office:value-type="float" office:value="309" calcext:value-type="float">
            <text:p>309</text:p>
          </table:table-cell>
          <table:table-cell table:style-name="ce11" office:value-type="float" office:value="255" calcext:value-type="float">
            <text:p>255</text:p>
          </table:table-cell>
          <table:table-cell table:style-name="ce21" office:value-type="string" calcext:value-type="string">
            <text:p>3-81</text:p>
          </table:table-cell>
          <table:table-cell table:style-name="ce21" office:value-type="float" office:value="81" calcext:value-type="float">
            <text:p>81</text:p>
          </table:table-cell>
          <table:table-cell table:style-name="ce11" office:value-type="string" calcext:value-type="string">
            <text:p>土方歳三</text:p>
          </table:table-cell>
          <table:table-cell table:style-name="ce11" office:value-type="string" calcext:value-type="string">
            <text:p>土方歳三 (PSR)</text:p>
          </table:table-cell>
          <table:table-cell table:style-name="ce11" office:value-type="string" calcext:value-type="string">
            <text:p>ひじかたとしぞう</text:p>
          </table:table-cell>
          <table:table-cell table:style-name="ce11" office:value-type="string" calcext:value-type="string">
            <text:p>第３弾ブースターパック</text:p>
          </table:table-cell>
          <table:table-cell table:style-name="ce11" table:formula="of:=VLOOKUP([.H310];[$収録番号.$A$1:$収録番号.$B$10];2;0)" office:value-type="float" office:value="35" calcext:value-type="float">
            <text:p>35</text:p>
          </table:table-cell>
          <table:table-cell table:style-name="ce11" office:value-type="string" calcext:value-type="string">
            <text:p>PSR</text:p>
          </table:table-cell>
          <table:table-cell table:style-name="ce11" table:formula="of:=VLOOKUP([.J310];[$レアリティ番号.$A$1:$レアリティ番号.$B$4];2;0)" office:value-type="float" office:value="8" calcext:value-type="float">
            <text:p>8</text:p>
          </table:table-cell>
          <table:table-cell table:style-name="ce11" office:value-type="string" calcext:value-type="string">
            <text:p>イジン</text:p>
          </table:table-cell>
          <table:table-cell table:style-name="ce11" table:formula="of:=VLOOKUP([.L31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10];[$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0];[$能力語番号.$A$1:$能力語番号.$B$11];2;0);0)" office:value-type="float" office:value="0" calcext:value-type="float">
            <text:p>0</text:p>
          </table:table-cell>
          <table:table-cell office:value-type="string" calcext:value-type="string">
            <text:p>志願</text:p>
          </table:table-cell>
          <table:table-cell table:style-name="ce11" table:formula="of:=IFERROR(VLOOKUP([.$T310];[$特性番号.$A$1:$特性番号.$B$8];2;0);0)" office:value-type="float" office:value="32" calcext:value-type="float">
            <text:p>32</text:p>
          </table:table-cell>
          <table:table-cell table:style-name="ce11"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table:style-name="ce11" office:value-type="float" office:value="5000" calcext:value-type="float">
            <text:p>5000</text:p>
          </table:table-cell>
          <table:table-cell table:style-name="ce25" office:value-type="string" calcext:value-type="string">
            <text:p>山札の上か下に戻す</text:p>
          </table:table-cell>
          <table:table-cell table:style-name="ce11" table:formula="of:=IFERROR(VLOOKUP([.$X310];[$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text:a xlink:href="https://one-draw.jp/ijinden/cardlist/003/card/03_081" xlink:type="simple">https://one-draw.jp/ijinden/cardlist/003/card/03_081</text:a>.png</text:p>
          </table:table-cell>
          <table:table-cell table:style-name="ce11" table:formula="of:=CONCATENATE([$JSON.$A$1];[.$C310];[$JSON.$B$1];[.$E310];[$JSON.$C$1];[.F310];[$JSON.$D$1];[.$G310];[$JSON.$E$1];IF(ISNA([.$T310]);&quot;null&quot;;&quot;&quot;&quot;&quot;&amp;[.$T310]&amp;&quot;&quot;&quot;&quot;);[$JSON.$F$1];[.$V310];[$JSON.$G$1];IF(ISNA([.$X310]);&quot;null&quot;;&quot;&quot;&quot;&quot;&amp;[.$X310]&amp;&quot;&quot;&quot;&quot;);[$JSON.$H$1];[.$AA310];[$JSON.$I$1];[.$I310];[$JSON.$J$1];[.K310];[$JSON.$K$1];[.$M310];[$JSON.$L$1];[.$P310];[$JSON.$M$1];[.$O310];[$JSON.$N$1];[.$S310];[$JSON.$O$1];[.$U310];[$JSON.$P$1];IF(ISNA([.$W310]);&quot;null&quot;;[.$W310]);[$JSON.$Q$1];[.$Y310];[$JSON.$R$1];IF([.$Z310];&quot;true&quot;;&quot;false&quot;);[$JSON.$S$1];[.$A310];[$JSON.$T$1];[.$B310];[$JSON.$U$1])" office:value-type="string" office:string-value="{&quot;id&quot;:&quot;3-81&quot;,&quot;name&quot;:&quot;土方歳三&quot;,&quot;displayName&quot;:&quot;土方歳三 (PSR)&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81.png&quot;,&quot;expansion&quot;:35,&quot;rarity&quot;:8,&quot;type&quot;:1,&quot;level&quot;:6,&quot;color&quot;:16,&quot;term&quot;:0,&quot;trait&quot;:32,&quot;power&quot;:5000,&quot;legacy&quot;:7,&quot;anyNumCopies&quot;:false,&quot;orderTable&quot;:309,&quot;orderDeck&quot;:255}," calcext:value-type="string">
            <text:p>{"id":"3-81","name":"土方歳三","displayName":"土方歳三 (PSR)","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81.png","expansion":35,"rarity":8,"type":1,"level":6,"color":16,"term":0,"trait":32,"power":5000,"legacy":7,"anyNumCopies":false,"orderTable":309,"orderDeck":255},</text:p>
          </table:table-cell>
          <table:table-cell table:style-name="ce11" table:number-columns-repeated="16356"/>
        </table:table-row>
        <table:table-row table:style-name="ro2">
          <table:table-cell table:style-name="ce11" office:value-type="float" office:value="310" calcext:value-type="float">
            <text:p>310</text:p>
          </table:table-cell>
          <table:table-cell table:style-name="ce11" office:value-type="float" office:value="232" calcext:value-type="float">
            <text:p>232</text:p>
          </table:table-cell>
          <table:table-cell table:style-name="ce21" office:value-type="string" calcext:value-type="string">
            <text:p>4-1</text:p>
          </table:table-cell>
          <table:table-cell table:style-name="ce21" office:value-type="float" office:value="1" calcext:value-type="float">
            <text:p>1</text:p>
          </table:table-cell>
          <table:table-cell table:style-name="ce11" office:value-type="string" calcext:value-type="string">
            <text:p>西郷隆盛</text:p>
          </table:table-cell>
          <table:table-cell table:style-name="ce11" table:formula="of:=[.E311]" office:value-type="string" office:string-value="西郷隆盛" calcext:value-type="string">
            <text:p>西郷隆盛</text:p>
          </table:table-cell>
          <table:table-cell table:style-name="ce11" office:value-type="string" calcext:value-type="string">
            <text:p>さいごうたかもり</text:p>
          </table:table-cell>
          <table:table-cell table:style-name="ce11" office:value-type="string" calcext:value-type="string">
            <text:p>第４弾ブースターパック</text:p>
          </table:table-cell>
          <table:table-cell table:style-name="ce11" table:formula="of:=VLOOKUP([.H311];[$収録番号.$A$1:$収録番号.$B$10];2;0)" office:value-type="float" office:value="45" calcext:value-type="float">
            <text:p>45</text:p>
          </table:table-cell>
          <table:table-cell table:style-name="ce11" office:value-type="string" calcext:value-type="string">
            <text:p>SR</text:p>
          </table:table-cell>
          <table:table-cell table:style-name="ce11" table:formula="of:=VLOOKUP([.J311];[$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1];[$種類番号.$A$1:$種類番号.$B$4];2;0)" office:value-type="float" office:value="1" calcext:value-type="float">
            <text:p>1</text:p>
          </table:table-cell>
          <table:table-cell table:style-name="ce11" office:value-type="string" calcext:value-type="string">
            <text:p>赤</text:p>
          </table:table-cell>
          <table:table-cell table:style-name="ce11" table:formula="of:=VLOOKUP([.N311];[$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11];[$特性番号.$A$1:$特性番号.$B$8];2;0);0)" office:value-type="float" office:value="0" calcext:value-type="float">
            <text:p>0</text:p>
          </table:table-cell>
          <table:table-cell table:style-name="ce11" office:value-type="string" calcext:value-type="string">
            <text:p>モータル¶イジンが相手の戦場にいる間「アタック+3000」を得る。</text:p>
          </table:table-cell>
          <table:table-cell table:style-name="ce11"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31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1.png</text:p>
          </table:table-cell>
          <table:table-cell table:style-name="ce11" table:formula="of:=CONCATENATE([$JSON.$A$1];[.$C311];[$JSON.$B$1];[.$E311];[$JSON.$C$1];[.F311];[$JSON.$D$1];[.$G311];[$JSON.$E$1];IF(ISNA([.$T311]);&quot;null&quot;;&quot;&quot;&quot;&quot;&amp;[.$T311]&amp;&quot;&quot;&quot;&quot;);[$JSON.$F$1];[.$V311];[$JSON.$G$1];IF(ISNA([.$X311]);&quot;null&quot;;&quot;&quot;&quot;&quot;&amp;[.$X311]&amp;&quot;&quot;&quot;&quot;);[$JSON.$H$1];[.$AA311];[$JSON.$I$1];[.$I311];[$JSON.$J$1];[.K311];[$JSON.$K$1];[.$M311];[$JSON.$L$1];[.$P311];[$JSON.$M$1];[.$O311];[$JSON.$N$1];[.$S311];[$JSON.$O$1];[.$U311];[$JSON.$P$1];IF(ISNA([.$W311]);&quot;null&quot;;[.$W311]);[$JSON.$Q$1];[.$Y311];[$JSON.$R$1];IF([.$Z311];&quot;true&quot;;&quot;false&quot;);[$JSON.$S$1];[.$A311];[$JSON.$T$1];[.$B311];[$JSON.$U$1])" office:value-type="string" office:string-value="{&quot;id&quot;:&quot;4-1&quot;,&quot;name&quot;:&quot;西郷隆盛&quot;,&quot;displayName&quot;:&quot;西郷隆盛&quot;,&quot;kana&quot;:&quot;さいごうたかもり&quot;,&quot;traitText&quot;:null,&quot;ruleText&quot;:&quot;モータル¶イジンが相手の戦場にいる間「アタック+3000」を得る。&quot;,&quot;legacyText&quot;:null,&quot;imageUrl&quot;:&quot;https://one-draw.jp/ijinden/cardlist/004/card/04_001.png&quot;,&quot;expansion&quot;:45,&quot;rarity&quot;:4,&quot;type&quot;:1,&quot;level&quot;:6,&quot;color&quot;:1,&quot;term&quot;:0,&quot;trait&quot;:0,&quot;power&quot;:2000,&quot;legacy&quot;:0,&quot;anyNumCopies&quot;:false,&quot;orderTable&quot;:310,&quot;orderDeck&quot;:232}," calcext:value-type="string">
            <text:p>{"id":"4-1","name":"西郷隆盛","displayName":"西郷隆盛","kana":"さいごうたかもり","traitText":null,"ruleText":"モータル¶イジンが相手の戦場にいる間「アタック+3000」を得る。","legacyText":null,"imageUrl":"https://one-draw.jp/ijinden/cardlist/004/card/04_001.png","expansion":45,"rarity":4,"type":1,"level":6,"color":1,"term":0,"trait":0,"power":2000,"legacy":0,"anyNumCopies":false,"orderTable":310,"orderDeck":232},</text:p>
          </table:table-cell>
          <table:table-cell table:number-columns-repeated="16356"/>
        </table:table-row>
        <table:table-row table:style-name="ro2">
          <table:table-cell table:style-name="ce11" office:value-type="float" office:value="311" calcext:value-type="float">
            <text:p>311</text:p>
          </table:table-cell>
          <table:table-cell table:style-name="ce11" office:value-type="float" office:value="91" calcext:value-type="float">
            <text:p>91</text:p>
          </table:table-cell>
          <table:table-cell table:style-name="ce21" office:value-type="string" calcext:value-type="string">
            <text:p>4-2</text:p>
          </table:table-cell>
          <table:table-cell table:style-name="ce21" office:value-type="float" office:value="2" calcext:value-type="float">
            <text:p>2</text:p>
          </table:table-cell>
          <table:table-cell table:style-name="ce11" office:value-type="string" calcext:value-type="string">
            <text:p>リチャード・アークライト</text:p>
          </table:table-cell>
          <table:table-cell table:style-name="ce11" table:formula="of:=[.E312]" office:value-type="string" office:string-value="リチャード・アークライト" calcext:value-type="string">
            <text:p>リチャード・アークライト</text:p>
          </table:table-cell>
          <table:table-cell table:style-name="ce11" office:value-type="string" calcext:value-type="string">
            <text:p>りちゃーどあーくらいと</text:p>
          </table:table-cell>
          <table:table-cell table:style-name="ce11" office:value-type="string" calcext:value-type="string">
            <text:p>第４弾ブースターパック</text:p>
          </table:table-cell>
          <table:table-cell table:style-name="ce11" table:formula="of:=VLOOKUP([.H312];[$収録番号.$A$1:$収録番号.$B$10];2;0)" office:value-type="float" office:value="45" calcext:value-type="float">
            <text:p>45</text:p>
          </table:table-cell>
          <table:table-cell table:style-name="ce11" office:value-type="string" calcext:value-type="string">
            <text:p>SR</text:p>
          </table:table-cell>
          <table:table-cell table:style-name="ce11" table:formula="of:=VLOOKUP([.J312];[$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2];[$種類番号.$A$1:$種類番号.$B$4];2;0)" office:value-type="float" office:value="1" calcext:value-type="float">
            <text:p>1</text:p>
          </table:table-cell>
          <table:table-cell table:style-name="ce11" office:value-type="string" calcext:value-type="string">
            <text:p>赤</text:p>
          </table:table-cell>
          <table:table-cell table:style-name="ce11" table:formula="of:=VLOOKUP([.N312];[$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12];[$特性番号.$A$1:$特性番号.$B$8];2;0);0)" office:value-type="float" office:value="0" calcext:value-type="float">
            <text:p>0</text:p>
          </table:table-cell>
          <table:table-cell table:style-name="ce11"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table:style-name="ce11" office:value-type="float" office:value="3000" calcext:value-type="float">
            <text:p>3000</text:p>
          </table:table-cell>
          <table:table-cell table:style-name="ce25" office:value-type="string" calcext:value-type="string">
            <text:p>魔力化</text:p>
          </table:table-cell>
          <table:table-cell table:style-name="ce11" table:formula="of:=IFERROR(VLOOKUP([.$X312];[$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2.png</text:p>
          </table:table-cell>
          <table:table-cell table:style-name="ce11" table:formula="of:=CONCATENATE([$JSON.$A$1];[.$C312];[$JSON.$B$1];[.$E312];[$JSON.$C$1];[.F312];[$JSON.$D$1];[.$G312];[$JSON.$E$1];IF(ISNA([.$T312]);&quot;null&quot;;&quot;&quot;&quot;&quot;&amp;[.$T312]&amp;&quot;&quot;&quot;&quot;);[$JSON.$F$1];[.$V312];[$JSON.$G$1];IF(ISNA([.$X312]);&quot;null&quot;;&quot;&quot;&quot;&quot;&amp;[.$X312]&amp;&quot;&quot;&quot;&quot;);[$JSON.$H$1];[.$AA312];[$JSON.$I$1];[.$I312];[$JSON.$J$1];[.K312];[$JSON.$K$1];[.$M312];[$JSON.$L$1];[.$P312];[$JSON.$M$1];[.$O312];[$JSON.$N$1];[.$S312];[$JSON.$O$1];[.$U312];[$JSON.$P$1];IF(ISNA([.$W312]);&quot;null&quot;;[.$W312]);[$JSON.$Q$1];[.$Y312];[$JSON.$R$1];IF([.$Z312];&quot;true&quot;;&quot;false&quot;);[$JSON.$S$1];[.$A312];[$JSON.$T$1];[.$B312];[$JSON.$U$1])" office:value-type="string" office:string-value="{&quot;id&quot;:&quot;4-2&quot;,&quot;name&quot;:&quot;リチャード・アークライト&quot;,&quot;displayName&quot;:&quot;リチャード・アークライト&quot;,&quot;kana&quot;:&quot;りちゃーどあーくらいと&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rarity&quot;:4,&quot;type&quot;:1,&quot;level&quot;:3,&quot;color&quot;:1,&quot;term&quot;:0,&quot;trait&quot;:0,&quot;power&quot;:3000,&quot;legacy&quot;:1,&quot;anyNumCopies&quot;:false,&quot;orderTable&quot;:311,&quot;orderDeck&quot;:91}," calcext:value-type="string">
            <text:p>{"id":"4-2","name":"リチャード・アークライト","displayName":"リチャード・アークライト","kana":"りちゃーどあーくらいと","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rarity":4,"type":1,"level":3,"color":1,"term":0,"trait":0,"power":3000,"legacy":1,"anyNumCopies":false,"orderTable":311,"orderDeck":91},</text:p>
          </table:table-cell>
          <table:table-cell table:number-columns-repeated="16356"/>
        </table:table-row>
        <table:table-row table:style-name="ro2">
          <table:table-cell table:style-name="ce11" office:value-type="float" office:value="312" calcext:value-type="float">
            <text:p>312</text:p>
          </table:table-cell>
          <table:table-cell table:style-name="ce11" office:value-type="float" office:value="153" calcext:value-type="float">
            <text:p>153</text:p>
          </table:table-cell>
          <table:table-cell table:style-name="ce21" office:value-type="string" calcext:value-type="string">
            <text:p>4-3</text:p>
          </table:table-cell>
          <table:table-cell table:style-name="ce21" office:value-type="float" office:value="3" calcext:value-type="float">
            <text:p>3</text:p>
          </table:table-cell>
          <table:table-cell table:style-name="ce11" office:value-type="string" calcext:value-type="string">
            <text:p>アンナ・パブロワ</text:p>
          </table:table-cell>
          <table:table-cell table:style-name="ce11" table:formula="of:=[.E313]" office:value-type="string" office:string-value="アンナ・パブロワ" calcext:value-type="string">
            <text:p>アンナ・パブロワ</text:p>
          </table:table-cell>
          <table:table-cell table:style-name="ce11" office:value-type="string" calcext:value-type="string">
            <text:p>あんなぱぶろわ</text:p>
          </table:table-cell>
          <table:table-cell table:style-name="ce11" office:value-type="string" calcext:value-type="string">
            <text:p>第４弾ブースターパック</text:p>
          </table:table-cell>
          <table:table-cell table:style-name="ce11" table:formula="of:=VLOOKUP([.H313];[$収録番号.$A$1:$収録番号.$B$10];2;0)" office:value-type="float" office:value="45" calcext:value-type="float">
            <text:p>45</text:p>
          </table:table-cell>
          <table:table-cell table:style-name="ce11" office:value-type="string" calcext:value-type="string">
            <text:p>SR</text:p>
          </table:table-cell>
          <table:table-cell table:style-name="ce11" table:formula="of:=VLOOKUP([.J313];[$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3];[$種類番号.$A$1:$種類番号.$B$4];2;0)" office:value-type="float" office:value="1" calcext:value-type="float">
            <text:p>1</text:p>
          </table:table-cell>
          <table:table-cell table:style-name="ce11" office:value-type="string" calcext:value-type="string">
            <text:p>青</text:p>
          </table:table-cell>
          <table:table-cell table:style-name="ce11" table:formula="of:=VLOOKUP([.N313];[$色番号.$A$1:$色番号.$B$10];2;0)" office:value-type="float" office:value="2" calcext:value-type="float">
            <text:p>2</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13];[$特性番号.$A$1:$特性番号.$B$8];2;0);0)" office:value-type="float" office:value="0" calcext:value-type="float">
            <text:p>0</text:p>
          </table:table-cell>
          <table:table-cell table:style-name="ce11"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1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3.png</text:p>
          </table:table-cell>
          <table:table-cell table:style-name="ce11" table:formula="of:=CONCATENATE([$JSON.$A$1];[.$C313];[$JSON.$B$1];[.$E313];[$JSON.$C$1];[.F313];[$JSON.$D$1];[.$G313];[$JSON.$E$1];IF(ISNA([.$T313]);&quot;null&quot;;&quot;&quot;&quot;&quot;&amp;[.$T313]&amp;&quot;&quot;&quot;&quot;);[$JSON.$F$1];[.$V313];[$JSON.$G$1];IF(ISNA([.$X313]);&quot;null&quot;;&quot;&quot;&quot;&quot;&amp;[.$X313]&amp;&quot;&quot;&quot;&quot;);[$JSON.$H$1];[.$AA313];[$JSON.$I$1];[.$I313];[$JSON.$J$1];[.K313];[$JSON.$K$1];[.$M313];[$JSON.$L$1];[.$P313];[$JSON.$M$1];[.$O313];[$JSON.$N$1];[.$S313];[$JSON.$O$1];[.$U313];[$JSON.$P$1];IF(ISNA([.$W313]);&quot;null&quot;;[.$W313]);[$JSON.$Q$1];[.$Y313];[$JSON.$R$1];IF([.$Z313];&quot;true&quot;;&quot;false&quot;);[$JSON.$S$1];[.$A313];[$JSON.$T$1];[.$B313];[$JSON.$U$1])" office:value-type="string" office:string-value="{&quot;id&quot;:&quot;4-3&quot;,&quot;name&quot;:&quot;アンナ・パブロワ&quot;,&quot;displayName&quot;:&quot;アンナ・パブロワ&quot;,&quot;kana&quot;:&quot;あんなぱぶろわ&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rarity&quot;:4,&quot;type&quot;:1,&quot;level&quot;:4,&quot;color&quot;:2,&quot;term&quot;:0,&quot;trait&quot;:0,&quot;power&quot;:1000,&quot;legacy&quot;:4,&quot;anyNumCopies&quot;:false,&quot;orderTable&quot;:312,&quot;orderDeck&quot;:153}," calcext:value-type="string">
            <text:p>{"id":"4-3","name":"アンナ・パブロワ","displayName":"アンナ・パブロワ","kana":"あんなぱぶろわ","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rarity":4,"type":1,"level":4,"color":2,"term":0,"trait":0,"power":1000,"legacy":4,"anyNumCopies":false,"orderTable":312,"orderDeck":153},</text:p>
          </table:table-cell>
          <table:table-cell table:number-columns-repeated="16356"/>
        </table:table-row>
        <table:table-row table:style-name="ro2">
          <table:table-cell table:style-name="ce11" office:value-type="float" office:value="313" calcext:value-type="float">
            <text:p>313</text:p>
          </table:table-cell>
          <table:table-cell table:style-name="ce11" office:value-type="float" office:value="263" calcext:value-type="float">
            <text:p>263</text:p>
          </table:table-cell>
          <table:table-cell table:style-name="ce21" office:value-type="string" calcext:value-type="string">
            <text:p>4-4</text:p>
          </table:table-cell>
          <table:table-cell table:style-name="ce21" office:value-type="float" office:value="4" calcext:value-type="float">
            <text:p>4</text:p>
          </table:table-cell>
          <table:table-cell table:style-name="ce11" office:value-type="string" calcext:value-type="string">
            <text:p>ルイ14世</text:p>
          </table:table-cell>
          <table:table-cell table:style-name="ce11" table:formula="of:=[.E314]" office:value-type="string" office:string-value="ルイ14世" calcext:value-type="string">
            <text:p>ルイ14世</text:p>
          </table:table-cell>
          <table:table-cell table:style-name="ce11" office:value-type="string" calcext:value-type="string">
            <text:p>るいじゅうよんせい</text:p>
          </table:table-cell>
          <table:table-cell table:style-name="ce11" office:value-type="string" calcext:value-type="string">
            <text:p>第４弾ブースターパック</text:p>
          </table:table-cell>
          <table:table-cell table:style-name="ce11" table:formula="of:=VLOOKUP([.H314];[$収録番号.$A$1:$収録番号.$B$10];2;0)" office:value-type="float" office:value="45" calcext:value-type="float">
            <text:p>45</text:p>
          </table:table-cell>
          <table:table-cell table:style-name="ce11" office:value-type="string" calcext:value-type="string">
            <text:p>SR</text:p>
          </table:table-cell>
          <table:table-cell table:style-name="ce11" table:formula="of:=VLOOKUP([.J314];[$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4];[$種類番号.$A$1:$種類番号.$B$4];2;0)" office:value-type="float" office:value="1" calcext:value-type="float">
            <text:p>1</text:p>
          </table:table-cell>
          <table:table-cell table:style-name="ce11" office:value-type="string" calcext:value-type="string">
            <text:p>青</text:p>
          </table:table-cell>
          <table:table-cell table:style-name="ce11" table:formula="of:=VLOOKUP([.N314];[$色番号.$A$1:$色番号.$B$10];2;0)" office:value-type="float" office:value="2" calcext:value-type="float">
            <text:p>2</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14];[$特性番号.$A$1:$特性番号.$B$8];2;0);0)" office:value-type="float" office:value="0" calcext:value-type="float">
            <text:p>0</text:p>
          </table:table-cell>
          <table:table-cell table:style-name="ce11"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1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4.png</text:p>
          </table:table-cell>
          <table:table-cell table:style-name="ce11" table:formula="of:=CONCATENATE([$JSON.$A$1];[.$C314];[$JSON.$B$1];[.$E314];[$JSON.$C$1];[.F314];[$JSON.$D$1];[.$G314];[$JSON.$E$1];IF(ISNA([.$T314]);&quot;null&quot;;&quot;&quot;&quot;&quot;&amp;[.$T314]&amp;&quot;&quot;&quot;&quot;);[$JSON.$F$1];[.$V314];[$JSON.$G$1];IF(ISNA([.$X314]);&quot;null&quot;;&quot;&quot;&quot;&quot;&amp;[.$X314]&amp;&quot;&quot;&quot;&quot;);[$JSON.$H$1];[.$AA314];[$JSON.$I$1];[.$I314];[$JSON.$J$1];[.K314];[$JSON.$K$1];[.$M314];[$JSON.$L$1];[.$P314];[$JSON.$M$1];[.$O314];[$JSON.$N$1];[.$S314];[$JSON.$O$1];[.$U314];[$JSON.$P$1];IF(ISNA([.$W314]);&quot;null&quot;;[.$W314]);[$JSON.$Q$1];[.$Y314];[$JSON.$R$1];IF([.$Z314];&quot;true&quot;;&quot;false&quot;);[$JSON.$S$1];[.$A314];[$JSON.$T$1];[.$B314];[$JSON.$U$1])" office:value-type="string" office:string-value="{&quot;id&quot;:&quot;4-4&quot;,&quot;name&quot;:&quot;ルイ14世&quot;,&quot;displayName&quot;:&quot;ルイ14世&quot;,&quot;kana&quot;:&quot;るいじゅうよんせい&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rarity&quot;:4,&quot;type&quot;:1,&quot;level&quot;:7,&quot;color&quot;:2,&quot;term&quot;:0,&quot;trait&quot;:0,&quot;power&quot;:5000,&quot;legacy&quot;:0,&quot;anyNumCopies&quot;:false,&quot;orderTable&quot;:313,&quot;orderDeck&quot;:263}," calcext:value-type="string">
            <text:p>{"id":"4-4","name":"ルイ14世","displayName":"ルイ14世","kana":"るいじゅうよんせい","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rarity":4,"type":1,"level":7,"color":2,"term":0,"trait":0,"power":5000,"legacy":0,"anyNumCopies":false,"orderTable":313,"orderDeck":263},</text:p>
          </table:table-cell>
          <table:table-cell table:number-columns-repeated="16356"/>
        </table:table-row>
        <table:table-row table:style-name="ro2">
          <table:table-cell table:style-name="ce11" office:value-type="float" office:value="314" calcext:value-type="float">
            <text:p>314</text:p>
          </table:table-cell>
          <table:table-cell table:style-name="ce11" office:value-type="float" office:value="62" calcext:value-type="float">
            <text:p>62</text:p>
          </table:table-cell>
          <table:table-cell table:style-name="ce21" office:value-type="string" calcext:value-type="string">
            <text:p>4-5</text:p>
          </table:table-cell>
          <table:table-cell table:style-name="ce21" office:value-type="float" office:value="5" calcext:value-type="float">
            <text:p>5</text:p>
          </table:table-cell>
          <table:table-cell table:style-name="ce11" office:value-type="string" calcext:value-type="string">
            <text:p>藤原不比等</text:p>
          </table:table-cell>
          <table:table-cell table:style-name="ce11" table:formula="of:=[.E315]" office:value-type="string" office:string-value="藤原不比等" calcext:value-type="string">
            <text:p>藤原不比等</text:p>
          </table:table-cell>
          <table:table-cell table:style-name="ce11" office:value-type="string" calcext:value-type="string">
            <text:p>ふじわらのふひと</text:p>
          </table:table-cell>
          <table:table-cell table:style-name="ce11" office:value-type="string" calcext:value-type="string">
            <text:p>第４弾ブースターパック</text:p>
          </table:table-cell>
          <table:table-cell table:style-name="ce11" table:formula="of:=VLOOKUP([.H315];[$収録番号.$A$1:$収録番号.$B$10];2;0)" office:value-type="float" office:value="45" calcext:value-type="float">
            <text:p>45</text:p>
          </table:table-cell>
          <table:table-cell table:style-name="ce11" office:value-type="string" calcext:value-type="string">
            <text:p>SR</text:p>
          </table:table-cell>
          <table:table-cell table:style-name="ce11" table:formula="of:=VLOOKUP([.J315];[$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5];[$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15];[$特性番号.$A$1:$特性番号.$B$8];2;0);0)" office:value-type="float" office:value="0" calcext:value-type="float">
            <text:p>0</text:p>
          </table:table-cell>
          <table:table-cell table:style-name="ce11"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table:style-name="ce11" office:value-type="float" office:value="2000" calcext:value-type="float">
            <text:p>2000</text:p>
          </table:table-cell>
          <table:table-cell table:style-name="ce25" office:value-type="string" calcext:value-type="string">
            <text:p>反魂</text:p>
          </table:table-cell>
          <table:table-cell table:style-name="ce11" table:formula="of:=IFERROR(VLOOKUP([.$X315];[$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5.png</text:p>
          </table:table-cell>
          <table:table-cell table:style-name="ce11" table:formula="of:=CONCATENATE([$JSON.$A$1];[.$C315];[$JSON.$B$1];[.$E315];[$JSON.$C$1];[.F315];[$JSON.$D$1];[.$G315];[$JSON.$E$1];IF(ISNA([.$T315]);&quot;null&quot;;&quot;&quot;&quot;&quot;&amp;[.$T315]&amp;&quot;&quot;&quot;&quot;);[$JSON.$F$1];[.$V315];[$JSON.$G$1];IF(ISNA([.$X315]);&quot;null&quot;;&quot;&quot;&quot;&quot;&amp;[.$X315]&amp;&quot;&quot;&quot;&quot;);[$JSON.$H$1];[.$AA315];[$JSON.$I$1];[.$I315];[$JSON.$J$1];[.K315];[$JSON.$K$1];[.$M315];[$JSON.$L$1];[.$P315];[$JSON.$M$1];[.$O315];[$JSON.$N$1];[.$S315];[$JSON.$O$1];[.$U315];[$JSON.$P$1];IF(ISNA([.$W315]);&quot;null&quot;;[.$W315]);[$JSON.$Q$1];[.$Y315];[$JSON.$R$1];IF([.$Z315];&quot;true&quot;;&quot;false&quot;);[$JSON.$S$1];[.$A315];[$JSON.$T$1];[.$B315];[$JSON.$U$1])" office:value-type="string" office:string-value="{&quot;id&quot;:&quot;4-5&quot;,&quot;name&quot;:&quot;藤原不比等&quot;,&quot;displayName&quot;:&quot;藤原不比等&quot;,&quot;kana&quot;:&quot;ふじわらのふひと&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rarity&quot;:4,&quot;type&quot;:1,&quot;level&quot;:2,&quot;color&quot;:4,&quot;term&quot;:0,&quot;trait&quot;:0,&quot;power&quot;:2000,&quot;legacy&quot;:6,&quot;anyNumCopies&quot;:false,&quot;orderTable&quot;:314,&quot;orderDeck&quot;:62}," calcext:value-type="string">
            <text:p>{"id":"4-5","name":"藤原不比等","displayName":"藤原不比等","kana":"ふじわらのふひと","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rarity":4,"type":1,"level":2,"color":4,"term":0,"trait":0,"power":2000,"legacy":6,"anyNumCopies":false,"orderTable":314,"orderDeck":62},</text:p>
          </table:table-cell>
          <table:table-cell table:number-columns-repeated="16356"/>
        </table:table-row>
        <table:table-row table:style-name="ro2">
          <table:table-cell table:style-name="ce11" office:value-type="float" office:value="315" calcext:value-type="float">
            <text:p>315</text:p>
          </table:table-cell>
          <table:table-cell table:style-name="ce11" office:value-type="float" office:value="162" calcext:value-type="float">
            <text:p>162</text:p>
          </table:table-cell>
          <table:table-cell table:style-name="ce21" office:value-type="string" calcext:value-type="string">
            <text:p>4-6</text:p>
          </table:table-cell>
          <table:table-cell table:style-name="ce21" office:value-type="float" office:value="6" calcext:value-type="float">
            <text:p>6</text:p>
          </table:table-cell>
          <table:table-cell table:style-name="ce11" office:value-type="string" calcext:value-type="string">
            <text:p>伊能忠敬</text:p>
          </table:table-cell>
          <table:table-cell table:style-name="ce11" table:formula="of:=[.E316]" office:value-type="string" office:string-value="伊能忠敬" calcext:value-type="string">
            <text:p>伊能忠敬</text:p>
          </table:table-cell>
          <table:table-cell table:style-name="ce11" office:value-type="string" calcext:value-type="string">
            <text:p>いのうただたか</text:p>
          </table:table-cell>
          <table:table-cell table:style-name="ce11" office:value-type="string" calcext:value-type="string">
            <text:p>第４弾ブースターパック</text:p>
          </table:table-cell>
          <table:table-cell table:style-name="ce11" table:formula="of:=VLOOKUP([.H316];[$収録番号.$A$1:$収録番号.$B$10];2;0)" office:value-type="float" office:value="45" calcext:value-type="float">
            <text:p>45</text:p>
          </table:table-cell>
          <table:table-cell table:style-name="ce11" office:value-type="string" calcext:value-type="string">
            <text:p>SR</text:p>
          </table:table-cell>
          <table:table-cell table:style-name="ce11" table:formula="of:=VLOOKUP([.J316];[$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6];[$種類番号.$A$1:$種類番号.$B$4];2;0)" office:value-type="float" office:value="1" calcext:value-type="float">
            <text:p>1</text:p>
          </table:table-cell>
          <table:table-cell table:style-name="ce11" office:value-type="string" calcext:value-type="string">
            <text:p>緑</text:p>
          </table:table-cell>
          <table:table-cell table:style-name="ce11" table:formula="of:=VLOOKUP([.N316];[$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16];[$特性番号.$A$1:$特性番号.$B$8];2;0);0)" office:value-type="float" office:value="0" calcext:value-type="float">
            <text:p>0</text:p>
          </table:table-cell>
          <table:table-cell table:style-name="ce11"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1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6.png</text:p>
          </table:table-cell>
          <table:table-cell table:style-name="ce11" table:formula="of:=CONCATENATE([$JSON.$A$1];[.$C316];[$JSON.$B$1];[.$E316];[$JSON.$C$1];[.F316];[$JSON.$D$1];[.$G316];[$JSON.$E$1];IF(ISNA([.$T316]);&quot;null&quot;;&quot;&quot;&quot;&quot;&amp;[.$T316]&amp;&quot;&quot;&quot;&quot;);[$JSON.$F$1];[.$V316];[$JSON.$G$1];IF(ISNA([.$X316]);&quot;null&quot;;&quot;&quot;&quot;&quot;&amp;[.$X316]&amp;&quot;&quot;&quot;&quot;);[$JSON.$H$1];[.$AA316];[$JSON.$I$1];[.$I316];[$JSON.$J$1];[.K316];[$JSON.$K$1];[.$M316];[$JSON.$L$1];[.$P316];[$JSON.$M$1];[.$O316];[$JSON.$N$1];[.$S316];[$JSON.$O$1];[.$U316];[$JSON.$P$1];IF(ISNA([.$W316]);&quot;null&quot;;[.$W316]);[$JSON.$Q$1];[.$Y316];[$JSON.$R$1];IF([.$Z316];&quot;true&quot;;&quot;false&quot;);[$JSON.$S$1];[.$A316];[$JSON.$T$1];[.$B316];[$JSON.$U$1])" office:value-type="string" office:string-value="{&quot;id&quot;:&quot;4-6&quot;,&quot;name&quot;:&quot;伊能忠敬&quot;,&quot;displayName&quot;:&quot;伊能忠敬&quot;,&quot;kana&quot;:&quot;いのうただたか&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rarity&quot;:4,&quot;type&quot;:1,&quot;level&quot;:4,&quot;color&quot;:4,&quot;term&quot;:0,&quot;trait&quot;:0,&quot;power&quot;:3000,&quot;legacy&quot;:4,&quot;anyNumCopies&quot;:false,&quot;orderTable&quot;:315,&quot;orderDeck&quot;:162}," calcext:value-type="string">
            <text:p>{"id":"4-6","name":"伊能忠敬","displayName":"伊能忠敬","kana":"いのうただたか","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rarity":4,"type":1,"level":4,"color":4,"term":0,"trait":0,"power":3000,"legacy":4,"anyNumCopies":false,"orderTable":315,"orderDeck":162},</text:p>
          </table:table-cell>
          <table:table-cell table:number-columns-repeated="16356"/>
        </table:table-row>
        <table:table-row table:style-name="ro2">
          <table:table-cell table:style-name="ce11" office:value-type="float" office:value="316" calcext:value-type="float">
            <text:p>316</text:p>
          </table:table-cell>
          <table:table-cell table:style-name="ce11" office:value-type="float" office:value="171" calcext:value-type="float">
            <text:p>171</text:p>
          </table:table-cell>
          <table:table-cell table:style-name="ce21" office:value-type="string" calcext:value-type="string">
            <text:p>4-7</text:p>
          </table:table-cell>
          <table:table-cell table:style-name="ce21" office:value-type="float" office:value="7" calcext:value-type="float">
            <text:p>7</text:p>
          </table:table-cell>
          <table:table-cell table:style-name="ce11" office:value-type="string" calcext:value-type="string">
            <text:p>アリエノール・ダキテーヌ</text:p>
          </table:table-cell>
          <table:table-cell table:style-name="ce11" table:formula="of:=[.E317]" office:value-type="string" office:string-value="アリエノール・ダキテーヌ" calcext:value-type="string">
            <text:p>アリエノール・ダキテーヌ</text:p>
          </table:table-cell>
          <table:table-cell table:style-name="ce11" office:value-type="string" calcext:value-type="string">
            <text:p>ありえのーるだきてーぬ</text:p>
          </table:table-cell>
          <table:table-cell table:style-name="ce11" office:value-type="string" calcext:value-type="string">
            <text:p>第４弾ブースターパック</text:p>
          </table:table-cell>
          <table:table-cell table:style-name="ce11" table:formula="of:=VLOOKUP([.H317];[$収録番号.$A$1:$収録番号.$B$10];2;0)" office:value-type="float" office:value="45" calcext:value-type="float">
            <text:p>45</text:p>
          </table:table-cell>
          <table:table-cell table:style-name="ce11" office:value-type="string" calcext:value-type="string">
            <text:p>SR</text:p>
          </table:table-cell>
          <table:table-cell table:style-name="ce11" table:formula="of:=VLOOKUP([.J317];[$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7];[$種類番号.$A$1:$種類番号.$B$4];2;0)" office:value-type="float" office:value="1" calcext:value-type="float">
            <text:p>1</text:p>
          </table:table-cell>
          <table:table-cell table:style-name="ce11" office:value-type="string" calcext:value-type="string">
            <text:p>黄</text:p>
          </table:table-cell>
          <table:table-cell table:style-name="ce11" table:formula="of:=VLOOKUP([.N317];[$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17];[$特性番号.$A$1:$特性番号.$B$8];2;0);0)" office:value-type="float" office:value="0" calcext:value-type="float">
            <text:p>0</text:p>
          </table:table-cell>
          <table:table-cell table:style-name="ce11"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table:style-name="ce11" office:value-type="float" office:value="1000" calcext:value-type="float">
            <text:p>1000</text:p>
          </table:table-cell>
          <table:table-cell table:style-name="ce25" office:value-type="string" calcext:value-type="string">
            <text:p>魔力化</text:p>
          </table:table-cell>
          <table:table-cell table:style-name="ce11" table:formula="of:=IFERROR(VLOOKUP([.$X317];[$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7.png</text:p>
          </table:table-cell>
          <table:table-cell table:style-name="ce11" table:formula="of:=CONCATENATE([$JSON.$A$1];[.$C317];[$JSON.$B$1];[.$E317];[$JSON.$C$1];[.F317];[$JSON.$D$1];[.$G317];[$JSON.$E$1];IF(ISNA([.$T317]);&quot;null&quot;;&quot;&quot;&quot;&quot;&amp;[.$T317]&amp;&quot;&quot;&quot;&quot;);[$JSON.$F$1];[.$V317];[$JSON.$G$1];IF(ISNA([.$X317]);&quot;null&quot;;&quot;&quot;&quot;&quot;&amp;[.$X317]&amp;&quot;&quot;&quot;&quot;);[$JSON.$H$1];[.$AA317];[$JSON.$I$1];[.$I317];[$JSON.$J$1];[.K317];[$JSON.$K$1];[.$M317];[$JSON.$L$1];[.$P317];[$JSON.$M$1];[.$O317];[$JSON.$N$1];[.$S317];[$JSON.$O$1];[.$U317];[$JSON.$P$1];IF(ISNA([.$W317]);&quot;null&quot;;[.$W317]);[$JSON.$Q$1];[.$Y317];[$JSON.$R$1];IF([.$Z317];&quot;true&quot;;&quot;false&quot;);[$JSON.$S$1];[.$A317];[$JSON.$T$1];[.$B317];[$JSON.$U$1])" office:value-type="string" office:string-value="{&quot;id&quot;:&quot;4-7&quot;,&quot;name&quot;:&quot;アリエノール・ダキテーヌ&quot;,&quot;displayName&quot;:&quot;アリエノール・ダキテーヌ&quot;,&quot;kana&quot;:&quot;ありえのーるだきてーぬ&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rarity&quot;:4,&quot;type&quot;:1,&quot;level&quot;:4,&quot;color&quot;:8,&quot;term&quot;:0,&quot;trait&quot;:0,&quot;power&quot;:1000,&quot;legacy&quot;:1,&quot;anyNumCopies&quot;:false,&quot;orderTable&quot;:316,&quot;orderDeck&quot;:171}," calcext:value-type="string">
            <text:p>{"id":"4-7","name":"アリエノール・ダキテーヌ","displayName":"アリエノール・ダキテーヌ","kana":"ありえのーるだきてーぬ","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rarity":4,"type":1,"level":4,"color":8,"term":0,"trait":0,"power":1000,"legacy":1,"anyNumCopies":false,"orderTable":316,"orderDeck":171},</text:p>
          </table:table-cell>
          <table:table-cell table:number-columns-repeated="16356"/>
        </table:table-row>
        <table:table-row table:style-name="ro2">
          <table:table-cell table:style-name="ce11" office:value-type="float" office:value="317" calcext:value-type="float">
            <text:p>317</text:p>
          </table:table-cell>
          <table:table-cell table:style-name="ce11" office:value-type="float" office:value="275" calcext:value-type="float">
            <text:p>275</text:p>
          </table:table-cell>
          <table:table-cell table:style-name="ce21" office:value-type="string" calcext:value-type="string">
            <text:p>4-8</text:p>
          </table:table-cell>
          <table:table-cell table:style-name="ce21" office:value-type="float" office:value="8" calcext:value-type="float">
            <text:p>8</text:p>
          </table:table-cell>
          <table:table-cell table:style-name="ce11" office:value-type="string" calcext:value-type="string">
            <text:p>アルキメデス</text:p>
          </table:table-cell>
          <table:table-cell table:style-name="ce11" table:formula="of:=[.E318]" office:value-type="string" office:string-value="アルキメデス" calcext:value-type="string">
            <text:p>アルキメデス</text:p>
          </table:table-cell>
          <table:table-cell table:style-name="ce11" office:value-type="string" calcext:value-type="string">
            <text:p>あるきめです</text:p>
          </table:table-cell>
          <table:table-cell table:style-name="ce11" office:value-type="string" calcext:value-type="string">
            <text:p>第４弾ブースターパック</text:p>
          </table:table-cell>
          <table:table-cell table:style-name="ce11" table:formula="of:=VLOOKUP([.H318];[$収録番号.$A$1:$収録番号.$B$10];2;0)" office:value-type="float" office:value="45" calcext:value-type="float">
            <text:p>45</text:p>
          </table:table-cell>
          <table:table-cell table:style-name="ce11" office:value-type="string" calcext:value-type="string">
            <text:p>SR</text:p>
          </table:table-cell>
          <table:table-cell table:style-name="ce11" table:formula="of:=VLOOKUP([.J318];[$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8];[$種類番号.$A$1:$種類番号.$B$4];2;0)" office:value-type="float" office:value="1" calcext:value-type="float">
            <text:p>1</text:p>
          </table:table-cell>
          <table:table-cell table:style-name="ce11" office:value-type="string" calcext:value-type="string">
            <text:p>黄</text:p>
          </table:table-cell>
          <table:table-cell table:style-name="ce11" table:formula="of:=VLOOKUP([.N318];[$色番号.$A$1:$色番号.$B$10];2;0)" office:value-type="float" office:value="8" calcext:value-type="float">
            <text:p>8</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18];[$特性番号.$A$1:$特性番号.$B$8];2;0);0)" office:value-type="float" office:value="0" calcext:value-type="float">
            <text:p>0</text:p>
          </table:table-cell>
          <table:table-cell table:style-name="ce11"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table:style-name="ce11" office:value-type="float" office:value="6000" calcext:value-type="float">
            <text:p>6000</text:p>
          </table:table-cell>
          <table:table-cell table:style-name="ce25" office:value-type="string" calcext:value-type="string">
            <text:p>魔力化</text:p>
          </table:table-cell>
          <table:table-cell table:style-name="ce11" table:formula="of:=IFERROR(VLOOKUP([.$X318];[$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8.png</text:p>
          </table:table-cell>
          <table:table-cell table:style-name="ce11" table:formula="of:=CONCATENATE([$JSON.$A$1];[.$C318];[$JSON.$B$1];[.$E318];[$JSON.$C$1];[.F318];[$JSON.$D$1];[.$G318];[$JSON.$E$1];IF(ISNA([.$T318]);&quot;null&quot;;&quot;&quot;&quot;&quot;&amp;[.$T318]&amp;&quot;&quot;&quot;&quot;);[$JSON.$F$1];[.$V318];[$JSON.$G$1];IF(ISNA([.$X318]);&quot;null&quot;;&quot;&quot;&quot;&quot;&amp;[.$X318]&amp;&quot;&quot;&quot;&quot;);[$JSON.$H$1];[.$AA318];[$JSON.$I$1];[.$I318];[$JSON.$J$1];[.K318];[$JSON.$K$1];[.$M318];[$JSON.$L$1];[.$P318];[$JSON.$M$1];[.$O318];[$JSON.$N$1];[.$S318];[$JSON.$O$1];[.$U318];[$JSON.$P$1];IF(ISNA([.$W318]);&quot;null&quot;;[.$W318]);[$JSON.$Q$1];[.$Y318];[$JSON.$R$1];IF([.$Z318];&quot;true&quot;;&quot;false&quot;);[$JSON.$S$1];[.$A318];[$JSON.$T$1];[.$B318];[$JSON.$U$1])" office:value-type="string" office:string-value="{&quot;id&quot;:&quot;4-8&quot;,&quot;name&quot;:&quot;アルキメデス&quot;,&quot;displayName&quot;:&quot;アルキメデス&quot;,&quot;kana&quot;:&quot;あるきめです&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rarity&quot;:4,&quot;type&quot;:1,&quot;level&quot;:7,&quot;color&quot;:8,&quot;term&quot;:0,&quot;trait&quot;:0,&quot;power&quot;:6000,&quot;legacy&quot;:1,&quot;anyNumCopies&quot;:false,&quot;orderTable&quot;:317,&quot;orderDeck&quot;:275}," calcext:value-type="string">
            <text:p>{"id":"4-8","name":"アルキメデス","displayName":"アルキメデス","kana":"あるきめです","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rarity":4,"type":1,"level":7,"color":8,"term":0,"trait":0,"power":6000,"legacy":1,"anyNumCopies":false,"orderTable":317,"orderDeck":275},</text:p>
          </table:table-cell>
          <table:table-cell table:number-columns-repeated="16356"/>
        </table:table-row>
        <table:table-row table:style-name="ro2">
          <table:table-cell table:style-name="ce11" office:value-type="float" office:value="318" calcext:value-type="float">
            <text:p>318</text:p>
          </table:table-cell>
          <table:table-cell table:style-name="ce11" office:value-type="float" office:value="222" calcext:value-type="float">
            <text:p>222</text:p>
          </table:table-cell>
          <table:table-cell table:style-name="ce21" office:value-type="string" calcext:value-type="string">
            <text:p>4-9</text:p>
          </table:table-cell>
          <table:table-cell table:style-name="ce21" office:value-type="float" office:value="9" calcext:value-type="float">
            <text:p>9</text:p>
          </table:table-cell>
          <table:table-cell table:style-name="ce11" office:value-type="string" calcext:value-type="string">
            <text:p>レオニダス</text:p>
          </table:table-cell>
          <table:table-cell table:style-name="ce11" table:formula="of:=[.E319]" office:value-type="string" office:string-value="レオニダス" calcext:value-type="string">
            <text:p>レオニダス</text:p>
          </table:table-cell>
          <table:table-cell table:style-name="ce11" office:value-type="string" calcext:value-type="string">
            <text:p>れおにだす</text:p>
          </table:table-cell>
          <table:table-cell table:style-name="ce11" office:value-type="string" calcext:value-type="string">
            <text:p>第４弾ブースターパック</text:p>
          </table:table-cell>
          <table:table-cell table:style-name="ce11" table:formula="of:=VLOOKUP([.H319];[$収録番号.$A$1:$収録番号.$B$10];2;0)" office:value-type="float" office:value="45" calcext:value-type="float">
            <text:p>45</text:p>
          </table:table-cell>
          <table:table-cell table:style-name="ce11" office:value-type="string" calcext:value-type="string">
            <text:p>SR</text:p>
          </table:table-cell>
          <table:table-cell table:style-name="ce11" table:formula="of:=VLOOKUP([.J319];[$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19];[$種類番号.$A$1:$種類番号.$B$4];2;0)" office:value-type="float" office:value="1" calcext:value-type="float">
            <text:p>1</text:p>
          </table:table-cell>
          <table:table-cell table:style-name="ce11" office:value-type="string" calcext:value-type="string">
            <text:p>紫</text:p>
          </table:table-cell>
          <table:table-cell table:style-name="ce11" table:formula="of:=VLOOKUP([.N319];[$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1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19];[$特性番号.$A$1:$特性番号.$B$8];2;0);0)" office:value-type="float" office:value="0" calcext:value-type="float">
            <text:p>0</text:p>
          </table:table-cell>
          <table:table-cell table:style-name="ce11" office:value-type="string" calcext:value-type="string">
            <text:p>戦場に置かれたとき、相手の山札の上から5枚を墓地に置く。¶カードが墓地に30枚以上ある間「即応 モータル」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1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09.png</text:p>
          </table:table-cell>
          <table:table-cell table:style-name="ce11" table:formula="of:=CONCATENATE([$JSON.$A$1];[.$C319];[$JSON.$B$1];[.$E319];[$JSON.$C$1];[.F319];[$JSON.$D$1];[.$G319];[$JSON.$E$1];IF(ISNA([.$T319]);&quot;null&quot;;&quot;&quot;&quot;&quot;&amp;[.$T319]&amp;&quot;&quot;&quot;&quot;);[$JSON.$F$1];[.$V319];[$JSON.$G$1];IF(ISNA([.$X319]);&quot;null&quot;;&quot;&quot;&quot;&quot;&amp;[.$X319]&amp;&quot;&quot;&quot;&quot;);[$JSON.$H$1];[.$AA319];[$JSON.$I$1];[.$I319];[$JSON.$J$1];[.K319];[$JSON.$K$1];[.$M319];[$JSON.$L$1];[.$P319];[$JSON.$M$1];[.$O319];[$JSON.$N$1];[.$S319];[$JSON.$O$1];[.$U319];[$JSON.$P$1];IF(ISNA([.$W319]);&quot;null&quot;;[.$W319]);[$JSON.$Q$1];[.$Y319];[$JSON.$R$1];IF([.$Z319];&quot;true&quot;;&quot;false&quot;);[$JSON.$S$1];[.$A319];[$JSON.$T$1];[.$B319];[$JSON.$U$1])" office:value-type="string" office:string-value="{&quot;id&quot;:&quot;4-9&quot;,&quot;name&quot;:&quot;レオニダス&quot;,&quot;displayName&quot;:&quot;レオニダス&quot;,&quot;kana&quot;:&quot;れおにだす&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rarity&quot;:4,&quot;type&quot;:1,&quot;level&quot;:5,&quot;color&quot;:16,&quot;term&quot;:0,&quot;trait&quot;:0,&quot;power&quot;:5000,&quot;legacy&quot;:0,&quot;anyNumCopies&quot;:false,&quot;orderTable&quot;:318,&quot;orderDeck&quot;:222}," calcext:value-type="string">
            <text:p>{"id":"4-9","name":"レオニダス","displayName":"レオニダス","kana":"れおにだす","traitText":null,"ruleText":"戦場に置かれたとき、相手の山札の上から5枚を墓地に置く。¶カードが墓地に30枚以上ある間「即応 モータル」を得る。","legacyText":null,"imageUrl":"https://one-draw.jp/ijinden/cardlist/004/card/04_009.png","expansion":45,"rarity":4,"type":1,"level":5,"color":16,"term":0,"trait":0,"power":5000,"legacy":0,"anyNumCopies":false,"orderTable":318,"orderDeck":222},</text:p>
          </table:table-cell>
          <table:table-cell table:number-columns-repeated="16356"/>
        </table:table-row>
        <table:table-row table:style-name="ro2">
          <table:table-cell table:style-name="ce11" office:value-type="float" office:value="319" calcext:value-type="float">
            <text:p>319</text:p>
          </table:table-cell>
          <table:table-cell table:style-name="ce11" office:value-type="float" office:value="297" calcext:value-type="float">
            <text:p>297</text:p>
          </table:table-cell>
          <table:table-cell table:style-name="ce21" office:value-type="string" calcext:value-type="string">
            <text:p>4-10</text:p>
          </table:table-cell>
          <table:table-cell table:style-name="ce21" office:value-type="float" office:value="10" calcext:value-type="float">
            <text:p>10</text:p>
          </table:table-cell>
          <table:table-cell table:style-name="ce11" office:value-type="string" calcext:value-type="string">
            <text:p>カール大帝</text:p>
          </table:table-cell>
          <table:table-cell table:style-name="ce11" table:formula="of:=[.E320]" office:value-type="string" office:string-value="カール大帝" calcext:value-type="string">
            <text:p>カール大帝</text:p>
          </table:table-cell>
          <table:table-cell table:style-name="ce11" office:value-type="string" calcext:value-type="string">
            <text:p>かーるたいてい</text:p>
          </table:table-cell>
          <table:table-cell table:style-name="ce11" office:value-type="string" calcext:value-type="string">
            <text:p>第４弾ブースターパック</text:p>
          </table:table-cell>
          <table:table-cell table:style-name="ce11" table:formula="of:=VLOOKUP([.H320];[$収録番号.$A$1:$収録番号.$B$10];2;0)" office:value-type="float" office:value="45" calcext:value-type="float">
            <text:p>45</text:p>
          </table:table-cell>
          <table:table-cell table:style-name="ce11" office:value-type="string" calcext:value-type="string">
            <text:p>SR</text:p>
          </table:table-cell>
          <table:table-cell table:style-name="ce11" table:formula="of:=VLOOKUP([.J320];[$レアリティ番号.$A$1:$レアリティ番号.$B$4];2;0)" office:value-type="float" office:value="4" calcext:value-type="float">
            <text:p>4</text:p>
          </table:table-cell>
          <table:table-cell table:style-name="ce11" office:value-type="string" calcext:value-type="string">
            <text:p>イジン</text:p>
          </table:table-cell>
          <table:table-cell table:style-name="ce11" table:formula="of:=VLOOKUP([.L32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20];[$色番号.$A$1:$色番号.$B$10];2;0)" office:value-type="float" office:value="16" calcext:value-type="float">
            <text:p>16</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20];[$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2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0.png</text:p>
          </table:table-cell>
          <table:table-cell table:style-name="ce11" table:formula="of:=CONCATENATE([$JSON.$A$1];[.$C320];[$JSON.$B$1];[.$E320];[$JSON.$C$1];[.F320];[$JSON.$D$1];[.$G320];[$JSON.$E$1];IF(ISNA([.$T320]);&quot;null&quot;;&quot;&quot;&quot;&quot;&amp;[.$T320]&amp;&quot;&quot;&quot;&quot;);[$JSON.$F$1];[.$V320];[$JSON.$G$1];IF(ISNA([.$X320]);&quot;null&quot;;&quot;&quot;&quot;&quot;&amp;[.$X320]&amp;&quot;&quot;&quot;&quot;);[$JSON.$H$1];[.$AA320];[$JSON.$I$1];[.$I320];[$JSON.$J$1];[.K320];[$JSON.$K$1];[.$M320];[$JSON.$L$1];[.$P320];[$JSON.$M$1];[.$O320];[$JSON.$N$1];[.$S320];[$JSON.$O$1];[.$U320];[$JSON.$P$1];IF(ISNA([.$W320]);&quot;null&quot;;[.$W320]);[$JSON.$Q$1];[.$Y320];[$JSON.$R$1];IF([.$Z320];&quot;true&quot;;&quot;false&quot;);[$JSON.$S$1];[.$A320];[$JSON.$T$1];[.$B320];[$JSON.$U$1])" office:value-type="string" office:string-value="{&quot;id&quot;:&quot;4-10&quot;,&quot;name&quot;:&quot;カール大帝&quot;,&quot;displayName&quot;:&quot;カール大帝&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rarity&quot;:4,&quot;type&quot;:1,&quot;level&quot;:10,&quot;color&quot;:16,&quot;term&quot;:0,&quot;trait&quot;:0,&quot;power&quot;:5000,&quot;legacy&quot;:0,&quot;anyNumCopies&quot;:false,&quot;orderTable&quot;:319,&quot;orderDeck&quot;:297}," calcext:value-type="string">
            <text:p>{"id":"4-10","name":"カール大帝","displayName":"カール大帝","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rarity":4,"type":1,"level":10,"color":16,"term":0,"trait":0,"power":5000,"legacy":0,"anyNumCopies":false,"orderTable":319,"orderDeck":297},</text:p>
          </table:table-cell>
          <table:table-cell table:number-columns-repeated="16356"/>
        </table:table-row>
        <table:table-row table:style-name="ro2">
          <table:table-cell table:style-name="ce11" office:value-type="float" office:value="320" calcext:value-type="float">
            <text:p>320</text:p>
          </table:table-cell>
          <table:table-cell table:style-name="ce11" office:value-type="float" office:value="142" calcext:value-type="float">
            <text:p>142</text:p>
          </table:table-cell>
          <table:table-cell table:style-name="ce21" office:value-type="string" calcext:value-type="string">
            <text:p>4-11</text:p>
          </table:table-cell>
          <table:table-cell table:style-name="ce21" office:value-type="float" office:value="11" calcext:value-type="float">
            <text:p>11</text:p>
          </table:table-cell>
          <table:table-cell table:style-name="ce11" office:value-type="string" calcext:value-type="string">
            <text:p>島津斉彬</text:p>
          </table:table-cell>
          <table:table-cell table:style-name="ce11" table:formula="of:=[.E321]" office:value-type="string" office:string-value="島津斉彬" calcext:value-type="string">
            <text:p>島津斉彬</text:p>
          </table:table-cell>
          <table:table-cell table:style-name="ce11" office:value-type="string" calcext:value-type="string">
            <text:p>しまづなりあきら</text:p>
          </table:table-cell>
          <table:table-cell table:style-name="ce11" office:value-type="string" calcext:value-type="string">
            <text:p>第４弾ブースターパック</text:p>
          </table:table-cell>
          <table:table-cell table:style-name="ce11" table:formula="of:=VLOOKUP([.H321];[$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2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1];[$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1];[$色番号.$A$1:$色番号.$B$10];2;0)" office:value-type="float" office:value="1" calcext:value-type="float">
            <text:p>1</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21];[$特性番号.$A$1:$特性番号.$B$8];2;0);0)" office:value-type="float" office:value="0" calcext:value-type="float">
            <text:p>0</text:p>
          </table:table-cell>
          <table:table-cell table:style-name="ce11" office:value-type="string" calcext:value-type="string">
            <text:p>これのイジン召喚に際し、これのレベルは、相手の戦場の起きているイジン1体につき1だけ下がる。¶戦場に置かれたとき、イジン召喚権+1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2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1.png</text:p>
          </table:table-cell>
          <table:table-cell table:style-name="ce11" table:formula="of:=CONCATENATE([$JSON.$A$1];[.$C321];[$JSON.$B$1];[.$E321];[$JSON.$C$1];[.F321];[$JSON.$D$1];[.$G321];[$JSON.$E$1];IF(ISNA([.$T321]);&quot;null&quot;;&quot;&quot;&quot;&quot;&amp;[.$T321]&amp;&quot;&quot;&quot;&quot;);[$JSON.$F$1];[.$V321];[$JSON.$G$1];IF(ISNA([.$X321]);&quot;null&quot;;&quot;&quot;&quot;&quot;&amp;[.$X321]&amp;&quot;&quot;&quot;&quot;);[$JSON.$H$1];[.$AA321];[$JSON.$I$1];[.$I321];[$JSON.$J$1];[.K321];[$JSON.$K$1];[.$M321];[$JSON.$L$1];[.$P321];[$JSON.$M$1];[.$O321];[$JSON.$N$1];[.$S321];[$JSON.$O$1];[.$U321];[$JSON.$P$1];IF(ISNA([.$W321]);&quot;null&quot;;[.$W321]);[$JSON.$Q$1];[.$Y321];[$JSON.$R$1];IF([.$Z321];&quot;true&quot;;&quot;false&quot;);[$JSON.$S$1];[.$A321];[$JSON.$T$1];[.$B321];[$JSON.$U$1])" office:value-type="string" office:string-value="{&quot;id&quot;:&quot;4-11&quot;,&quot;name&quot;:&quot;島津斉彬&quot;,&quot;displayName&quot;:&quot;島津斉彬&quot;,&quot;kana&quot;:&quot;しまづなりあきら&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rarity&quot;:1,&quot;type&quot;:1,&quot;level&quot;:4,&quot;color&quot;:1,&quot;term&quot;:0,&quot;trait&quot;:0,&quot;power&quot;:3000,&quot;legacy&quot;:4,&quot;anyNumCopies&quot;:false,&quot;orderTable&quot;:320,&quot;orderDeck&quot;:142}," calcext:value-type="string">
            <text:p>{"id":"4-11","name":"島津斉彬","displayName":"島津斉彬","kana":"しまづなりあきら","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rarity":1,"type":1,"level":4,"color":1,"term":0,"trait":0,"power":3000,"legacy":4,"anyNumCopies":false,"orderTable":320,"orderDeck":142},</text:p>
          </table:table-cell>
          <table:table-cell table:number-columns-repeated="16356"/>
        </table:table-row>
        <table:table-row table:style-name="ro2">
          <table:table-cell table:style-name="ce11" office:value-type="float" office:value="321" calcext:value-type="float">
            <text:p>321</text:p>
          </table:table-cell>
          <table:table-cell table:style-name="ce11" office:value-type="float" office:value="37" calcext:value-type="float">
            <text:p>37</text:p>
          </table:table-cell>
          <table:table-cell table:style-name="ce21" office:value-type="string" calcext:value-type="string">
            <text:p>4-12</text:p>
          </table:table-cell>
          <table:table-cell table:style-name="ce21" office:value-type="float" office:value="12" calcext:value-type="float">
            <text:p>12</text:p>
          </table:table-cell>
          <table:table-cell table:style-name="ce11" office:value-type="string" calcext:value-type="string">
            <text:p>島津久光</text:p>
          </table:table-cell>
          <table:table-cell table:style-name="ce11" table:formula="of:=[.E322]" office:value-type="string" office:string-value="島津久光" calcext:value-type="string">
            <text:p>島津久光</text:p>
          </table:table-cell>
          <table:table-cell table:style-name="ce11" office:value-type="string" calcext:value-type="string">
            <text:p>しまづひさみつ</text:p>
          </table:table-cell>
          <table:table-cell table:style-name="ce11" office:value-type="string" calcext:value-type="string">
            <text:p>第４弾ブースターパック</text:p>
          </table:table-cell>
          <table:table-cell table:style-name="ce11" table:formula="of:=VLOOKUP([.H322];[$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2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2];[$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22];[$特性番号.$A$1:$特性番号.$B$8];2;0);0)" office:value-type="float" office:value="0" calcext:value-type="float">
            <text:p>0</text:p>
          </table:table-cell>
          <table:table-cell table:style-name="ce11" office:value-type="string" calcext:value-type="string">
            <text:p>この能力はターンに1回しか発動しない。赤でないイジンが戦場に置かれたとき、1ドローする。¶アタ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2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2.png</text:p>
          </table:table-cell>
          <table:table-cell table:style-name="ce11" table:formula="of:=CONCATENATE([$JSON.$A$1];[.$C322];[$JSON.$B$1];[.$E322];[$JSON.$C$1];[.F322];[$JSON.$D$1];[.$G322];[$JSON.$E$1];IF(ISNA([.$T322]);&quot;null&quot;;&quot;&quot;&quot;&quot;&amp;[.$T322]&amp;&quot;&quot;&quot;&quot;);[$JSON.$F$1];[.$V322];[$JSON.$G$1];IF(ISNA([.$X322]);&quot;null&quot;;&quot;&quot;&quot;&quot;&amp;[.$X322]&amp;&quot;&quot;&quot;&quot;);[$JSON.$H$1];[.$AA322];[$JSON.$I$1];[.$I322];[$JSON.$J$1];[.K322];[$JSON.$K$1];[.$M322];[$JSON.$L$1];[.$P322];[$JSON.$M$1];[.$O322];[$JSON.$N$1];[.$S322];[$JSON.$O$1];[.$U322];[$JSON.$P$1];IF(ISNA([.$W322]);&quot;null&quot;;[.$W322]);[$JSON.$Q$1];[.$Y322];[$JSON.$R$1];IF([.$Z322];&quot;true&quot;;&quot;false&quot;);[$JSON.$S$1];[.$A322];[$JSON.$T$1];[.$B322];[$JSON.$U$1])" office:value-type="string" office:string-value="{&quot;id&quot;:&quot;4-12&quot;,&quot;name&quot;:&quot;島津久光&quot;,&quot;displayName&quot;:&quot;島津久光&quot;,&quot;kana&quot;:&quot;しまづひさみつ&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rarity&quot;:1,&quot;type&quot;:1,&quot;level&quot;:2,&quot;color&quot;:1,&quot;term&quot;:0,&quot;trait&quot;:0,&quot;power&quot;:1000,&quot;legacy&quot;:4,&quot;anyNumCopies&quot;:false,&quot;orderTable&quot;:321,&quot;orderDeck&quot;:37}," calcext:value-type="string">
            <text:p>{"id":"4-12","name":"島津久光","displayName":"島津久光","kana":"しまづひさみつ","traitText":null,"ruleText":"この能力はターンに1回しか発動しない。赤でないイジンが戦場に置かれたとき、1ドローする。¶アタック+2000","legacyText":"1ドローする","imageUrl":"https://one-draw.jp/ijinden/cardlist/004/card/04_012.png","expansion":45,"rarity":1,"type":1,"level":2,"color":1,"term":0,"trait":0,"power":1000,"legacy":4,"anyNumCopies":false,"orderTable":321,"orderDeck":37},</text:p>
          </table:table-cell>
          <table:table-cell table:number-columns-repeated="16356"/>
        </table:table-row>
        <table:table-row table:style-name="ro2">
          <table:table-cell table:style-name="ce11" office:value-type="float" office:value="322" calcext:value-type="float">
            <text:p>322</text:p>
          </table:table-cell>
          <table:table-cell table:style-name="ce11" office:value-type="float" office:value="190" calcext:value-type="float">
            <text:p>190</text:p>
          </table:table-cell>
          <table:table-cell table:style-name="ce21" office:value-type="string" calcext:value-type="string">
            <text:p>4-13</text:p>
          </table:table-cell>
          <table:table-cell table:style-name="ce21" office:value-type="float" office:value="13" calcext:value-type="float">
            <text:p>13</text:p>
          </table:table-cell>
          <table:table-cell table:style-name="ce11" office:value-type="string" calcext:value-type="string">
            <text:p>大久保利通</text:p>
          </table:table-cell>
          <table:table-cell table:style-name="ce11" table:formula="of:=[.E323]" office:value-type="string" office:string-value="大久保利通" calcext:value-type="string">
            <text:p>大久保利通</text:p>
          </table:table-cell>
          <table:table-cell table:style-name="ce11" office:value-type="string" calcext:value-type="string">
            <text:p>おおくぼとしみち</text:p>
          </table:table-cell>
          <table:table-cell table:style-name="ce11" office:value-type="string" calcext:value-type="string">
            <text:p>第４弾ブースターパック</text:p>
          </table:table-cell>
          <table:table-cell table:style-name="ce11" table:formula="of:=VLOOKUP([.H323];[$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23];[$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3];[$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3];[$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23];[$特性番号.$A$1:$特性番号.$B$8];2;0);0)" office:value-type="float" office:value="0" calcext:value-type="float">
            <text:p>0</text:p>
          </table:table-cell>
          <table:table-cell table:style-name="ce11"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2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3.png</text:p>
          </table:table-cell>
          <table:table-cell table:style-name="ce11" table:formula="of:=CONCATENATE([$JSON.$A$1];[.$C323];[$JSON.$B$1];[.$E323];[$JSON.$C$1];[.F323];[$JSON.$D$1];[.$G323];[$JSON.$E$1];IF(ISNA([.$T323]);&quot;null&quot;;&quot;&quot;&quot;&quot;&amp;[.$T323]&amp;&quot;&quot;&quot;&quot;);[$JSON.$F$1];[.$V323];[$JSON.$G$1];IF(ISNA([.$X323]);&quot;null&quot;;&quot;&quot;&quot;&quot;&amp;[.$X323]&amp;&quot;&quot;&quot;&quot;);[$JSON.$H$1];[.$AA323];[$JSON.$I$1];[.$I323];[$JSON.$J$1];[.K323];[$JSON.$K$1];[.$M323];[$JSON.$L$1];[.$P323];[$JSON.$M$1];[.$O323];[$JSON.$N$1];[.$S323];[$JSON.$O$1];[.$U323];[$JSON.$P$1];IF(ISNA([.$W323]);&quot;null&quot;;[.$W323]);[$JSON.$Q$1];[.$Y323];[$JSON.$R$1];IF([.$Z323];&quot;true&quot;;&quot;false&quot;);[$JSON.$S$1];[.$A323];[$JSON.$T$1];[.$B323];[$JSON.$U$1])" office:value-type="string" office:string-value="{&quot;id&quot;:&quot;4-13&quot;,&quot;name&quot;:&quot;大久保利通&quot;,&quot;displayName&quot;:&quot;大久保利通&quot;,&quot;kana&quot;:&quot;おおくぼとしみち&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rarity&quot;:1,&quot;type&quot;:1,&quot;level&quot;:5,&quot;color&quot;:1,&quot;term&quot;:0,&quot;trait&quot;:0,&quot;power&quot;:5000,&quot;legacy&quot;:0,&quot;anyNumCopies&quot;:false,&quot;orderTable&quot;:322,&quot;orderDeck&quot;:190}," calcext:value-type="string">
            <text:p>{"id":"4-13","name":"大久保利通","displayName":"大久保利通","kana":"おおくぼとしみち","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rarity":1,"type":1,"level":5,"color":1,"term":0,"trait":0,"power":5000,"legacy":0,"anyNumCopies":false,"orderTable":322,"orderDeck":190},</text:p>
          </table:table-cell>
          <table:table-cell table:number-columns-repeated="16356"/>
        </table:table-row>
        <table:table-row table:style-name="ro2">
          <table:table-cell table:style-name="ce11" office:value-type="float" office:value="323" calcext:value-type="float">
            <text:p>323</text:p>
          </table:table-cell>
          <table:table-cell table:style-name="ce11" office:value-type="float" office:value="191" calcext:value-type="float">
            <text:p>191</text:p>
          </table:table-cell>
          <table:table-cell table:style-name="ce21" office:value-type="string" calcext:value-type="string">
            <text:p>4-14</text:p>
          </table:table-cell>
          <table:table-cell table:style-name="ce21" office:value-type="float" office:value="14" calcext:value-type="float">
            <text:p>14</text:p>
          </table:table-cell>
          <table:table-cell table:style-name="ce11" office:value-type="string" calcext:value-type="string">
            <text:p>ジェームズ・ハーグリーブズ</text:p>
          </table:table-cell>
          <table:table-cell table:style-name="ce11" table:formula="of:=[.E324]" office:value-type="string" office:string-value="ジェームズ・ハーグリーブズ" calcext:value-type="string">
            <text:p>ジェームズ・ハーグリーブズ</text:p>
          </table:table-cell>
          <table:table-cell table:style-name="ce11" office:value-type="string" calcext:value-type="string">
            <text:p>じぇーむずはーぐりーぶず</text:p>
          </table:table-cell>
          <table:table-cell table:style-name="ce11" office:value-type="string" calcext:value-type="string">
            <text:p>第４弾ブースターパック</text:p>
          </table:table-cell>
          <table:table-cell table:style-name="ce11" table:formula="of:=VLOOKUP([.H324];[$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2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4];[$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4];[$色番号.$A$1:$色番号.$B$10];2;0)" office:value-type="float" office:value="1" calcext:value-type="float">
            <text:p>1</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24];[$特性番号.$A$1:$特性番号.$B$8];2;0);0)" office:value-type="float" office:value="0" calcext:value-type="float">
            <text:p>0</text:p>
          </table:table-cell>
          <table:table-cell table:style-name="ce11"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4.png</text:p>
          </table:table-cell>
          <table:table-cell table:style-name="ce11" table:formula="of:=CONCATENATE([$JSON.$A$1];[.$C324];[$JSON.$B$1];[.$E324];[$JSON.$C$1];[.F324];[$JSON.$D$1];[.$G324];[$JSON.$E$1];IF(ISNA([.$T324]);&quot;null&quot;;&quot;&quot;&quot;&quot;&amp;[.$T324]&amp;&quot;&quot;&quot;&quot;);[$JSON.$F$1];[.$V324];[$JSON.$G$1];IF(ISNA([.$X324]);&quot;null&quot;;&quot;&quot;&quot;&quot;&amp;[.$X324]&amp;&quot;&quot;&quot;&quot;);[$JSON.$H$1];[.$AA324];[$JSON.$I$1];[.$I324];[$JSON.$J$1];[.K324];[$JSON.$K$1];[.$M324];[$JSON.$L$1];[.$P324];[$JSON.$M$1];[.$O324];[$JSON.$N$1];[.$S324];[$JSON.$O$1];[.$U324];[$JSON.$P$1];IF(ISNA([.$W324]);&quot;null&quot;;[.$W324]);[$JSON.$Q$1];[.$Y324];[$JSON.$R$1];IF([.$Z324];&quot;true&quot;;&quot;false&quot;);[$JSON.$S$1];[.$A324];[$JSON.$T$1];[.$B324];[$JSON.$U$1])" office:value-type="string" office:string-value="{&quot;id&quot;:&quot;4-14&quot;,&quot;name&quot;:&quot;ジェームズ・ハーグリーブズ&quot;,&quot;displayName&quot;:&quot;ジェームズ・ハーグリーブズ&quot;,&quot;kana&quot;:&quot;じぇーむずはーぐりーぶず&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rarity&quot;:1,&quot;type&quot;:1,&quot;level&quot;:5,&quot;color&quot;:1,&quot;term&quot;:0,&quot;trait&quot;:0,&quot;power&quot;:4000,&quot;legacy&quot;:0,&quot;anyNumCopies&quot;:false,&quot;orderTable&quot;:323,&quot;orderDeck&quot;:191}," calcext:value-type="string">
            <text:p>{"id":"4-14","name":"ジェームズ・ハーグリーブズ","displayName":"ジェームズ・ハーグリーブズ","kana":"じぇーむずはーぐりーぶず","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rarity":1,"type":1,"level":5,"color":1,"term":0,"trait":0,"power":4000,"legacy":0,"anyNumCopies":false,"orderTable":323,"orderDeck":191},</text:p>
          </table:table-cell>
          <table:table-cell table:number-columns-repeated="16356"/>
        </table:table-row>
        <table:table-row table:style-name="ro2">
          <table:table-cell table:style-name="ce11" office:value-type="float" office:value="324" calcext:value-type="float">
            <text:p>324</text:p>
          </table:table-cell>
          <table:table-cell table:style-name="ce11" office:value-type="float" office:value="38" calcext:value-type="float">
            <text:p>38</text:p>
          </table:table-cell>
          <table:table-cell table:style-name="ce21" office:value-type="string" calcext:value-type="string">
            <text:p>4-15</text:p>
          </table:table-cell>
          <table:table-cell table:style-name="ce21" office:value-type="float" office:value="15" calcext:value-type="float">
            <text:p>15</text:p>
          </table:table-cell>
          <table:table-cell table:style-name="ce11" office:value-type="string" calcext:value-type="string">
            <text:p>ねね</text:p>
          </table:table-cell>
          <table:table-cell table:style-name="ce11" table:formula="of:=[.E325]" office:value-type="string" office:string-value="ねね" calcext:value-type="string">
            <text:p>ねね</text:p>
          </table:table-cell>
          <table:table-cell table:style-name="ce11" office:value-type="string" calcext:value-type="string">
            <text:p>ねね</text:p>
          </table:table-cell>
          <table:table-cell table:style-name="ce11" office:value-type="string" calcext:value-type="string">
            <text:p>第４弾ブースターパック</text:p>
          </table:table-cell>
          <table:table-cell table:style-name="ce11" table:formula="of:=VLOOKUP([.H325];[$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2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5];[$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5];[$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25];[$特性番号.$A$1:$特性番号.$B$8];2;0);0)" office:value-type="float" office:value="0" calcext:value-type="float">
            <text:p>0</text:p>
          </table:table-cell>
          <table:table-cell table:style-name="ce11"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table:style-name="ce11" office:value-type="float" office:value="500" calcext:value-type="float">
            <text:p>500</text:p>
          </table:table-cell>
          <table:table-cell table:style-name="ce25" office:value-type="string" calcext:value-type="string">
            <text:p>反魂</text:p>
          </table:table-cell>
          <table:table-cell table:style-name="ce11" table:formula="of:=IFERROR(VLOOKUP([.$X325];[$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5.png</text:p>
          </table:table-cell>
          <table:table-cell table:style-name="ce11" table:formula="of:=CONCATENATE([$JSON.$A$1];[.$C325];[$JSON.$B$1];[.$E325];[$JSON.$C$1];[.F325];[$JSON.$D$1];[.$G325];[$JSON.$E$1];IF(ISNA([.$T325]);&quot;null&quot;;&quot;&quot;&quot;&quot;&amp;[.$T325]&amp;&quot;&quot;&quot;&quot;);[$JSON.$F$1];[.$V325];[$JSON.$G$1];IF(ISNA([.$X325]);&quot;null&quot;;&quot;&quot;&quot;&quot;&amp;[.$X325]&amp;&quot;&quot;&quot;&quot;);[$JSON.$H$1];[.$AA325];[$JSON.$I$1];[.$I325];[$JSON.$J$1];[.K325];[$JSON.$K$1];[.$M325];[$JSON.$L$1];[.$P325];[$JSON.$M$1];[.$O325];[$JSON.$N$1];[.$S325];[$JSON.$O$1];[.$U325];[$JSON.$P$1];IF(ISNA([.$W325]);&quot;null&quot;;[.$W325]);[$JSON.$Q$1];[.$Y325];[$JSON.$R$1];IF([.$Z325];&quot;true&quot;;&quot;false&quot;);[$JSON.$S$1];[.$A325];[$JSON.$T$1];[.$B325];[$JSON.$U$1])" office:value-type="string" office:string-value="{&quot;id&quot;:&quot;4-15&quot;,&quot;name&quot;:&quot;ねね&quot;,&quot;displayName&quot;:&quot;ねね&quot;,&quot;kana&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rarity&quot;:2,&quot;type&quot;:1,&quot;level&quot;:2,&quot;color&quot;:1,&quot;term&quot;:0,&quot;trait&quot;:0,&quot;power&quot;:500,&quot;legacy&quot;:6,&quot;anyNumCopies&quot;:false,&quot;orderTable&quot;:324,&quot;orderDeck&quot;:38}," calcext:value-type="string">
            <text:p>{"id":"4-15","name":"ねね","displayName":"ねね","kana":"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rarity":2,"type":1,"level":2,"color":1,"term":0,"trait":0,"power":500,"legacy":6,"anyNumCopies":false,"orderTable":324,"orderDeck":38},</text:p>
          </table:table-cell>
          <table:table-cell table:number-columns-repeated="16356"/>
        </table:table-row>
        <table:table-row table:style-name="ro2">
          <table:table-cell table:style-name="ce11" office:value-type="float" office:value="325" calcext:value-type="float">
            <text:p>325</text:p>
          </table:table-cell>
          <table:table-cell table:style-name="ce11" office:value-type="float" office:value="233" calcext:value-type="float">
            <text:p>233</text:p>
          </table:table-cell>
          <table:table-cell table:style-name="ce21" office:value-type="string" calcext:value-type="string">
            <text:p>4-16</text:p>
          </table:table-cell>
          <table:table-cell table:style-name="ce21" office:value-type="float" office:value="16" calcext:value-type="float">
            <text:p>16</text:p>
          </table:table-cell>
          <table:table-cell table:style-name="ce11" office:value-type="string" calcext:value-type="string">
            <text:p>源為朝</text:p>
          </table:table-cell>
          <table:table-cell table:style-name="ce11" table:formula="of:=[.E326]" office:value-type="string" office:string-value="源為朝" calcext:value-type="string">
            <text:p>源為朝</text:p>
          </table:table-cell>
          <table:table-cell table:style-name="ce11" office:value-type="string" calcext:value-type="string">
            <text:p>みなもとのためとも</text:p>
          </table:table-cell>
          <table:table-cell table:style-name="ce11" office:value-type="string" calcext:value-type="string">
            <text:p>第４弾ブースターパック</text:p>
          </table:table-cell>
          <table:table-cell table:style-name="ce11" table:formula="of:=VLOOKUP([.H326];[$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26];[$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6];[$種類番号.$A$1:$種類番号.$B$4];2;0)" office:value-type="float" office:value="1" calcext:value-type="float">
            <text:p>1</text:p>
          </table:table-cell>
          <table:table-cell table:style-name="ce11" office:value-type="string" calcext:value-type="string">
            <text:p>赤</text:p>
          </table:table-cell>
          <table:table-cell table:style-name="ce11" table:formula="of:=VLOOKUP([.N326];[$色番号.$A$1:$色番号.$B$10];2;0)" office:value-type="float" office:value="1" calcext:value-type="float">
            <text:p>1</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26];[$特性番号.$A$1:$特性番号.$B$8];2;0);0)" office:value-type="float" office:value="0" calcext:value-type="float">
            <text:p>0</text:p>
          </table:table-cell>
          <table:table-cell table:style-name="ce11"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table:style-name="ce11"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2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6.png</text:p>
          </table:table-cell>
          <table:table-cell table:style-name="ce11" table:formula="of:=CONCATENATE([$JSON.$A$1];[.$C326];[$JSON.$B$1];[.$E326];[$JSON.$C$1];[.F326];[$JSON.$D$1];[.$G326];[$JSON.$E$1];IF(ISNA([.$T326]);&quot;null&quot;;&quot;&quot;&quot;&quot;&amp;[.$T326]&amp;&quot;&quot;&quot;&quot;);[$JSON.$F$1];[.$V326];[$JSON.$G$1];IF(ISNA([.$X326]);&quot;null&quot;;&quot;&quot;&quot;&quot;&amp;[.$X326]&amp;&quot;&quot;&quot;&quot;);[$JSON.$H$1];[.$AA326];[$JSON.$I$1];[.$I326];[$JSON.$J$1];[.K326];[$JSON.$K$1];[.$M326];[$JSON.$L$1];[.$P326];[$JSON.$M$1];[.$O326];[$JSON.$N$1];[.$S326];[$JSON.$O$1];[.$U326];[$JSON.$P$1];IF(ISNA([.$W326]);&quot;null&quot;;[.$W326]);[$JSON.$Q$1];[.$Y326];[$JSON.$R$1];IF([.$Z326];&quot;true&quot;;&quot;false&quot;);[$JSON.$S$1];[.$A326];[$JSON.$T$1];[.$B326];[$JSON.$U$1])" office:value-type="string" office:string-value="{&quot;id&quot;:&quot;4-16&quot;,&quot;name&quot;:&quot;源為朝&quot;,&quot;displayName&quot;:&quot;源為朝&quot;,&quot;kana&quot;:&quot;みなもとのためとも&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rarity&quot;:2,&quot;type&quot;:1,&quot;level&quot;:6,&quot;color&quot;:1,&quot;term&quot;:0,&quot;trait&quot;:0,&quot;power&quot;:4000,&quot;legacy&quot;:0,&quot;anyNumCopies&quot;:false,&quot;orderTable&quot;:325,&quot;orderDeck&quot;:233}," calcext:value-type="string">
            <text:p>{"id":"4-16","name":"源為朝","displayName":"源為朝","kana":"みなもとのためとも","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rarity":2,"type":1,"level":6,"color":1,"term":0,"trait":0,"power":4000,"legacy":0,"anyNumCopies":false,"orderTable":325,"orderDeck":233},</text:p>
          </table:table-cell>
          <table:table-cell table:number-columns-repeated="16356"/>
        </table:table-row>
        <table:table-row table:style-name="ro2">
          <table:table-cell table:style-name="ce11" office:value-type="float" office:value="326" calcext:value-type="float">
            <text:p>326</text:p>
          </table:table-cell>
          <table:table-cell table:style-name="ce11" office:value-type="float" office:value="103" calcext:value-type="float">
            <text:p>103</text:p>
          </table:table-cell>
          <table:table-cell table:style-name="ce21" office:value-type="string" calcext:value-type="string">
            <text:p>4-17</text:p>
          </table:table-cell>
          <table:table-cell table:style-name="ce21" office:value-type="float" office:value="17" calcext:value-type="float">
            <text:p>17</text:p>
          </table:table-cell>
          <table:table-cell table:style-name="ce11" office:value-type="string" calcext:value-type="string">
            <text:p>久坂玄瑞</text:p>
          </table:table-cell>
          <table:table-cell table:style-name="ce11" table:formula="of:=[.E327]" office:value-type="string" office:string-value="久坂玄瑞" calcext:value-type="string">
            <text:p>久坂玄瑞</text:p>
          </table:table-cell>
          <table:table-cell table:style-name="ce11" office:value-type="string" calcext:value-type="string">
            <text:p>くさかげんすい</text:p>
          </table:table-cell>
          <table:table-cell table:style-name="ce11" office:value-type="string" calcext:value-type="string">
            <text:p>第４弾ブースターパック</text:p>
          </table:table-cell>
          <table:table-cell table:style-name="ce11" table:formula="of:=VLOOKUP([.H327];[$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2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27];[$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7];[$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7];[$能力語番号.$A$1:$能力語番号.$B$11];2;0);0)" office:value-type="float" office:value="0" calcext:value-type="float">
            <text:p>0</text:p>
          </table:table-cell>
          <table:table-cell office:value-type="string" calcext:value-type="string">
            <text:p>思想</text:p>
          </table:table-cell>
          <table:table-cell table:style-name="ce11" table:formula="of:=IFERROR(VLOOKUP([.$T327];[$特性番号.$A$1:$特性番号.$B$8];2;0);0)" office:value-type="float" office:value="8" calcext:value-type="float">
            <text:p>8</text:p>
          </table:table-cell>
          <table:table-cell table:style-name="ce11" office:value-type="string" calcext:value-type="string">
            <text:p>赤か紫のカードが戦場にある間「即応」を得る。¶緑か黄のカードが戦場にある間「ウォッチャー」を得る。</text:p>
          </table:table-cell>
          <table:table-cell table:style-name="ce11" office:value-type="float" office:value="2000" calcext:value-type="float">
            <text:p>2000</text:p>
          </table:table-cell>
          <table:table-cell table:style-name="ce25" office:value-type="string" calcext:value-type="string">
            <text:p>喪神</text:p>
          </table:table-cell>
          <table:table-cell table:style-name="ce11" table:formula="of:=IFERROR(VLOOKUP([.$X327];[$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7.png</text:p>
          </table:table-cell>
          <table:table-cell table:style-name="ce11" table:formula="of:=CONCATENATE([$JSON.$A$1];[.$C327];[$JSON.$B$1];[.$E327];[$JSON.$C$1];[.F327];[$JSON.$D$1];[.$G327];[$JSON.$E$1];IF(ISNA([.$T327]);&quot;null&quot;;&quot;&quot;&quot;&quot;&amp;[.$T327]&amp;&quot;&quot;&quot;&quot;);[$JSON.$F$1];[.$V327];[$JSON.$G$1];IF(ISNA([.$X327]);&quot;null&quot;;&quot;&quot;&quot;&quot;&amp;[.$X327]&amp;&quot;&quot;&quot;&quot;);[$JSON.$H$1];[.$AA327];[$JSON.$I$1];[.$I327];[$JSON.$J$1];[.K327];[$JSON.$K$1];[.$M327];[$JSON.$L$1];[.$P327];[$JSON.$M$1];[.$O327];[$JSON.$N$1];[.$S327];[$JSON.$O$1];[.$U327];[$JSON.$P$1];IF(ISNA([.$W327]);&quot;null&quot;;[.$W327]);[$JSON.$Q$1];[.$Y327];[$JSON.$R$1];IF([.$Z327];&quot;true&quot;;&quot;false&quot;);[$JSON.$S$1];[.$A327];[$JSON.$T$1];[.$B327];[$JSON.$U$1])" office:value-type="string" office:string-value="{&quot;id&quot;:&quot;4-17&quot;,&quot;name&quot;:&quot;久坂玄瑞&quot;,&quot;displayName&quot;:&quot;久坂玄瑞&quot;,&quot;kana&quot;:&quot;くさかげんすい&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rarity&quot;:2,&quot;type&quot;:1,&quot;level&quot;:3,&quot;color&quot;:2,&quot;term&quot;:0,&quot;trait&quot;:8,&quot;power&quot;:2000,&quot;legacy&quot;:9,&quot;anyNumCopies&quot;:false,&quot;orderTable&quot;:326,&quot;orderDeck&quot;:103}," calcext:value-type="string">
            <text:p>{"id":"4-17","name":"久坂玄瑞","displayName":"久坂玄瑞","kana":"くさかげんすい","traitText":"思想","ruleText":"赤か紫のカードが戦場にある間「即応」を得る。¶緑か黄のカードが戦場にある間「ウォッチャー」を得る。","legacyText":"喪神","imageUrl":"https://one-draw.jp/ijinden/cardlist/004/card/04_017.png","expansion":45,"rarity":2,"type":1,"level":3,"color":2,"term":0,"trait":8,"power":2000,"legacy":9,"anyNumCopies":false,"orderTable":326,"orderDeck":103},</text:p>
          </table:table-cell>
          <table:table-cell table:number-columns-repeated="16356"/>
        </table:table-row>
        <table:table-row table:style-name="ro2">
          <table:table-cell table:style-name="ce11" office:value-type="float" office:value="327" calcext:value-type="float">
            <text:p>327</text:p>
          </table:table-cell>
          <table:table-cell table:style-name="ce11" office:value-type="float" office:value="203" calcext:value-type="float">
            <text:p>203</text:p>
          </table:table-cell>
          <table:table-cell table:style-name="ce21" office:value-type="string" calcext:value-type="string">
            <text:p>4-18</text:p>
          </table:table-cell>
          <table:table-cell table:style-name="ce21" office:value-type="float" office:value="18" calcext:value-type="float">
            <text:p>18</text:p>
          </table:table-cell>
          <table:table-cell table:style-name="ce11" office:value-type="string" calcext:value-type="string">
            <text:p>ポンパドゥール夫人</text:p>
          </table:table-cell>
          <table:table-cell table:style-name="ce11" table:formula="of:=[.E328]" office:value-type="string" office:string-value="ポンパドゥール夫人" calcext:value-type="string">
            <text:p>ポンパドゥール夫人</text:p>
          </table:table-cell>
          <table:table-cell table:style-name="ce11" office:value-type="string" calcext:value-type="string">
            <text:p>ぽんぱどぅーるふじん</text:p>
          </table:table-cell>
          <table:table-cell table:style-name="ce11" office:value-type="string" calcext:value-type="string">
            <text:p>第４弾ブースターパック</text:p>
          </table:table-cell>
          <table:table-cell table:style-name="ce11" table:formula="of:=VLOOKUP([.H328];[$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2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8];[$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8];[$色番号.$A$1:$色番号.$B$10];2;0)" office:value-type="float" office:value="2" calcext:value-type="float">
            <text:p>2</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28];[$特性番号.$A$1:$特性番号.$B$8];2;0);0)" office:value-type="float" office:value="0" calcext:value-type="float">
            <text:p>0</text:p>
          </table:table-cell>
          <table:table-cell table:style-name="ce11"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table:style-name="ce11" office:value-type="float" office:value="2000" calcext:value-type="float">
            <text:p>2000</text:p>
          </table:table-cell>
          <table:table-cell table:style-name="ce25" office:value-type="string" calcext:value-type="string">
            <text:p>木霊</text:p>
          </table:table-cell>
          <table:table-cell table:style-name="ce11" table:formula="of:=IFERROR(VLOOKUP([.$X328];[$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8.png</text:p>
          </table:table-cell>
          <table:table-cell table:style-name="ce11" table:formula="of:=CONCATENATE([$JSON.$A$1];[.$C328];[$JSON.$B$1];[.$E328];[$JSON.$C$1];[.F328];[$JSON.$D$1];[.$G328];[$JSON.$E$1];IF(ISNA([.$T328]);&quot;null&quot;;&quot;&quot;&quot;&quot;&amp;[.$T328]&amp;&quot;&quot;&quot;&quot;);[$JSON.$F$1];[.$V328];[$JSON.$G$1];IF(ISNA([.$X328]);&quot;null&quot;;&quot;&quot;&quot;&quot;&amp;[.$X328]&amp;&quot;&quot;&quot;&quot;);[$JSON.$H$1];[.$AA328];[$JSON.$I$1];[.$I328];[$JSON.$J$1];[.K328];[$JSON.$K$1];[.$M328];[$JSON.$L$1];[.$P328];[$JSON.$M$1];[.$O328];[$JSON.$N$1];[.$S328];[$JSON.$O$1];[.$U328];[$JSON.$P$1];IF(ISNA([.$W328]);&quot;null&quot;;[.$W328]);[$JSON.$Q$1];[.$Y328];[$JSON.$R$1];IF([.$Z328];&quot;true&quot;;&quot;false&quot;);[$JSON.$S$1];[.$A328];[$JSON.$T$1];[.$B328];[$JSON.$U$1])" office:value-type="string" office:string-value="{&quot;id&quot;:&quot;4-18&quot;,&quot;name&quot;:&quot;ポンパドゥール夫人&quot;,&quot;displayName&quot;:&quot;ポンパドゥール夫人&quot;,&quot;kana&quot;:&quot;ぽんぱどぅーるふじん&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rarity&quot;:1,&quot;type&quot;:1,&quot;level&quot;:5,&quot;color&quot;:2,&quot;term&quot;:0,&quot;trait&quot;:0,&quot;power&quot;:2000,&quot;legacy&quot;:8,&quot;anyNumCopies&quot;:false,&quot;orderTable&quot;:327,&quot;orderDeck&quot;:203}," calcext:value-type="string">
            <text:p>{"id":"4-18","name":"ポンパドゥール夫人","displayName":"ポンパドゥール夫人","kana":"ぽんぱどぅーるふじん","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rarity":1,"type":1,"level":5,"color":2,"term":0,"trait":0,"power":2000,"legacy":8,"anyNumCopies":false,"orderTable":327,"orderDeck":203},</text:p>
          </table:table-cell>
          <table:table-cell table:number-columns-repeated="16356"/>
        </table:table-row>
        <table:table-row table:style-name="ro2">
          <table:table-cell table:style-name="ce11" office:value-type="float" office:value="328" calcext:value-type="float">
            <text:p>328</text:p>
          </table:table-cell>
          <table:table-cell table:style-name="ce11" office:value-type="float" office:value="51" calcext:value-type="float">
            <text:p>51</text:p>
          </table:table-cell>
          <table:table-cell table:style-name="ce21" office:value-type="string" calcext:value-type="string">
            <text:p>4-19</text:p>
          </table:table-cell>
          <table:table-cell table:style-name="ce21" office:value-type="float" office:value="19" calcext:value-type="float">
            <text:p>19</text:p>
          </table:table-cell>
          <table:table-cell table:style-name="ce11" office:value-type="string" calcext:value-type="string">
            <text:p>エドモンド・カートライト</text:p>
          </table:table-cell>
          <table:table-cell table:style-name="ce11" table:formula="of:=[.E329]" office:value-type="string" office:string-value="エドモンド・カートライト" calcext:value-type="string">
            <text:p>エドモンド・カートライト</text:p>
          </table:table-cell>
          <table:table-cell table:style-name="ce11" office:value-type="string" calcext:value-type="string">
            <text:p>えどもんどかーとらいと</text:p>
          </table:table-cell>
          <table:table-cell table:style-name="ce11" office:value-type="string" calcext:value-type="string">
            <text:p>第４弾ブースターパック</text:p>
          </table:table-cell>
          <table:table-cell table:style-name="ce11" table:formula="of:=VLOOKUP([.H329];[$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2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29];[$種類番号.$A$1:$種類番号.$B$4];2;0)" office:value-type="float" office:value="1" calcext:value-type="float">
            <text:p>1</text:p>
          </table:table-cell>
          <table:table-cell table:style-name="ce11" office:value-type="string" calcext:value-type="string">
            <text:p>青</text:p>
          </table:table-cell>
          <table:table-cell table:style-name="ce11" table:formula="of:=VLOOKUP([.N329];[$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2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29];[$特性番号.$A$1:$特性番号.$B$8];2;0);0)" office:value-type="float" office:value="0" calcext:value-type="float">
            <text:p>0</text:p>
          </table:table-cell>
          <table:table-cell table:style-name="ce11" office:value-type="string" calcext:value-type="string">
            <text:p>イジンが戦場に置かれたとき、装備されているカード1つを指定して発動できる。そのカードを手札に戻して、1ドローする。¶ブロ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29];[$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19.png</text:p>
          </table:table-cell>
          <table:table-cell table:style-name="ce11" table:formula="of:=CONCATENATE([$JSON.$A$1];[.$C329];[$JSON.$B$1];[.$E329];[$JSON.$C$1];[.F329];[$JSON.$D$1];[.$G329];[$JSON.$E$1];IF(ISNA([.$T329]);&quot;null&quot;;&quot;&quot;&quot;&quot;&amp;[.$T329]&amp;&quot;&quot;&quot;&quot;);[$JSON.$F$1];[.$V329];[$JSON.$G$1];IF(ISNA([.$X329]);&quot;null&quot;;&quot;&quot;&quot;&quot;&amp;[.$X329]&amp;&quot;&quot;&quot;&quot;);[$JSON.$H$1];[.$AA329];[$JSON.$I$1];[.$I329];[$JSON.$J$1];[.K329];[$JSON.$K$1];[.$M329];[$JSON.$L$1];[.$P329];[$JSON.$M$1];[.$O329];[$JSON.$N$1];[.$S329];[$JSON.$O$1];[.$U329];[$JSON.$P$1];IF(ISNA([.$W329]);&quot;null&quot;;[.$W329]);[$JSON.$Q$1];[.$Y329];[$JSON.$R$1];IF([.$Z329];&quot;true&quot;;&quot;false&quot;);[$JSON.$S$1];[.$A329];[$JSON.$T$1];[.$B329];[$JSON.$U$1])" office:value-type="string" office:string-value="{&quot;id&quot;:&quot;4-19&quot;,&quot;name&quot;:&quot;エドモンド・カートライト&quot;,&quot;displayName&quot;:&quot;エドモンド・カートライト&quot;,&quot;kana&quot;:&quot;えどもんどかーとらいと&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rarity&quot;:1,&quot;type&quot;:1,&quot;level&quot;:2,&quot;color&quot;:2,&quot;term&quot;:0,&quot;trait&quot;:0,&quot;power&quot;:1000,&quot;legacy&quot;:4,&quot;anyNumCopies&quot;:false,&quot;orderTable&quot;:328,&quot;orderDeck&quot;:51}," calcext:value-type="string">
            <text:p>{"id":"4-19","name":"エドモンド・カートライト","displayName":"エドモンド・カートライト","kana":"えどもんどかーとらいと","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rarity":1,"type":1,"level":2,"color":2,"term":0,"trait":0,"power":1000,"legacy":4,"anyNumCopies":false,"orderTable":328,"orderDeck":51},</text:p>
          </table:table-cell>
          <table:table-cell table:number-columns-repeated="16356"/>
        </table:table-row>
        <table:table-row table:style-name="ro2">
          <table:table-cell table:style-name="ce11" office:value-type="float" office:value="329" calcext:value-type="float">
            <text:p>329</text:p>
          </table:table-cell>
          <table:table-cell table:style-name="ce11" office:value-type="float" office:value="52" calcext:value-type="float">
            <text:p>52</text:p>
          </table:table-cell>
          <table:table-cell table:style-name="ce21" office:value-type="string" calcext:value-type="string">
            <text:p>4-20</text:p>
          </table:table-cell>
          <table:table-cell table:style-name="ce21" office:value-type="float" office:value="20" calcext:value-type="float">
            <text:p>20</text:p>
          </table:table-cell>
          <table:table-cell table:style-name="ce11" office:value-type="string" calcext:value-type="string">
            <text:p>クロード・アシル・ドビュッシー</text:p>
          </table:table-cell>
          <table:table-cell table:style-name="ce11" table:formula="of:=[.E330]" office:value-type="string" office:string-value="クロード・アシル・ドビュッシー" calcext:value-type="string">
            <text:p>クロード・アシル・ドビュッシー</text:p>
          </table:table-cell>
          <table:table-cell table:style-name="ce11" office:value-type="string" calcext:value-type="string">
            <text:p>くろーどあしるどびゅっしー</text:p>
          </table:table-cell>
          <table:table-cell table:style-name="ce11" office:value-type="string" calcext:value-type="string">
            <text:p>第４弾ブースターパック</text:p>
          </table:table-cell>
          <table:table-cell table:style-name="ce11" table:formula="of:=VLOOKUP([.H330];[$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3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0];[$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0];[$色番号.$A$1:$色番号.$B$10];2;0)" office:value-type="float" office:value="2" calcext:value-type="float">
            <text:p>2</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0];[$能力語番号.$A$1:$能力語番号.$B$11];2;0);0)" office:value-type="float" office:value="0" calcext:value-type="float">
            <text:p>0</text:p>
          </table:table-cell>
          <table:table-cell office:value-type="string" calcext:value-type="string">
            <text:p>音楽</text:p>
          </table:table-cell>
          <table:table-cell table:style-name="ce11" table:formula="of:=IFERROR(VLOOKUP([.$T330];[$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0.png</text:p>
          </table:table-cell>
          <table:table-cell table:style-name="ce11" table:formula="of:=CONCATENATE([$JSON.$A$1];[.$C330];[$JSON.$B$1];[.$E330];[$JSON.$C$1];[.F330];[$JSON.$D$1];[.$G330];[$JSON.$E$1];IF(ISNA([.$T330]);&quot;null&quot;;&quot;&quot;&quot;&quot;&amp;[.$T330]&amp;&quot;&quot;&quot;&quot;);[$JSON.$F$1];[.$V330];[$JSON.$G$1];IF(ISNA([.$X330]);&quot;null&quot;;&quot;&quot;&quot;&quot;&amp;[.$X330]&amp;&quot;&quot;&quot;&quot;);[$JSON.$H$1];[.$AA330];[$JSON.$I$1];[.$I330];[$JSON.$J$1];[.K330];[$JSON.$K$1];[.$M330];[$JSON.$L$1];[.$P330];[$JSON.$M$1];[.$O330];[$JSON.$N$1];[.$S330];[$JSON.$O$1];[.$U330];[$JSON.$P$1];IF(ISNA([.$W330]);&quot;null&quot;;[.$W330]);[$JSON.$Q$1];[.$Y330];[$JSON.$R$1];IF([.$Z330];&quot;true&quot;;&quot;false&quot;);[$JSON.$S$1];[.$A330];[$JSON.$T$1];[.$B330];[$JSON.$U$1])" office:value-type="string" office:string-value="{&quot;id&quot;:&quot;4-20&quot;,&quot;name&quot;:&quot;クロード・アシル・ドビュッシー&quot;,&quot;displayName&quot;:&quot;クロード・アシル・ドビュッシー&quot;,&quot;kana&quot;:&quot;くろーどあしるどびゅっし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rarity&quot;:1,&quot;type&quot;:1,&quot;level&quot;:2,&quot;color&quot;:2,&quot;term&quot;:0,&quot;trait&quot;:4,&quot;power&quot;:2000,&quot;legacy&quot;:4,&quot;anyNumCopies&quot;:false,&quot;orderTable&quot;:329,&quot;orderDeck&quot;:52}," calcext:value-type="string">
            <text:p>{"id":"4-20","name":"クロード・アシル・ドビュッシー","displayName":"クロード・アシル・ドビュッシー","kana":"くろーどあしるどびゅっし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rarity":1,"type":1,"level":2,"color":2,"term":0,"trait":4,"power":2000,"legacy":4,"anyNumCopies":false,"orderTable":329,"orderDeck":52},</text:p>
          </table:table-cell>
          <table:table-cell table:number-columns-repeated="16356"/>
        </table:table-row>
        <table:table-row table:style-name="ro2">
          <table:table-cell table:style-name="ce11" office:value-type="float" office:value="330" calcext:value-type="float">
            <text:p>330</text:p>
          </table:table-cell>
          <table:table-cell table:style-name="ce11" office:value-type="float" office:value="12" calcext:value-type="float">
            <text:p>12</text:p>
          </table:table-cell>
          <table:table-cell table:style-name="ce21" office:value-type="string" calcext:value-type="string">
            <text:p>4-21</text:p>
          </table:table-cell>
          <table:table-cell table:style-name="ce21" office:value-type="float" office:value="21" calcext:value-type="float">
            <text:p>21</text:p>
          </table:table-cell>
          <table:table-cell table:style-name="ce11" office:value-type="string" calcext:value-type="string">
            <text:p>フレデリック・フランソワ・ショパン</text:p>
          </table:table-cell>
          <table:table-cell table:style-name="ce11" table:formula="of:=[.E331]" office:value-type="string" office:string-value="フレデリック・フランソワ・ショパン" calcext:value-type="string">
            <text:p>フレデリック・フランソワ・ショパン</text:p>
          </table:table-cell>
          <table:table-cell table:style-name="ce11" office:value-type="string" calcext:value-type="string">
            <text:p>ふれでりっくふらんそわしょぱん</text:p>
          </table:table-cell>
          <table:table-cell table:style-name="ce11" office:value-type="string" calcext:value-type="string">
            <text:p>第４弾ブースターパック</text:p>
          </table:table-cell>
          <table:table-cell table:style-name="ce11" table:formula="of:=VLOOKUP([.H331];[$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3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1];[$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1];[$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1];[$能力語番号.$A$1:$能力語番号.$B$11];2;0);0)" office:value-type="float" office:value="0" calcext:value-type="float">
            <text:p>0</text:p>
          </table:table-cell>
          <table:table-cell office:value-type="string" calcext:value-type="string">
            <text:p>音楽</text:p>
          </table:table-cell>
          <table:table-cell table:style-name="ce11" table:formula="of:=IFERROR(VLOOKUP([.$T331];[$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る。¶ブロック+2000</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3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1.png</text:p>
          </table:table-cell>
          <table:table-cell table:style-name="ce11" table:formula="of:=CONCATENATE([$JSON.$A$1];[.$C331];[$JSON.$B$1];[.$E331];[$JSON.$C$1];[.F331];[$JSON.$D$1];[.$G331];[$JSON.$E$1];IF(ISNA([.$T331]);&quot;null&quot;;&quot;&quot;&quot;&quot;&amp;[.$T331]&amp;&quot;&quot;&quot;&quot;);[$JSON.$F$1];[.$V331];[$JSON.$G$1];IF(ISNA([.$X331]);&quot;null&quot;;&quot;&quot;&quot;&quot;&amp;[.$X331]&amp;&quot;&quot;&quot;&quot;);[$JSON.$H$1];[.$AA331];[$JSON.$I$1];[.$I331];[$JSON.$J$1];[.K331];[$JSON.$K$1];[.$M331];[$JSON.$L$1];[.$P331];[$JSON.$M$1];[.$O331];[$JSON.$N$1];[.$S331];[$JSON.$O$1];[.$U331];[$JSON.$P$1];IF(ISNA([.$W331]);&quot;null&quot;;[.$W331]);[$JSON.$Q$1];[.$Y331];[$JSON.$R$1];IF([.$Z331];&quot;true&quot;;&quot;false&quot;);[$JSON.$S$1];[.$A331];[$JSON.$T$1];[.$B331];[$JSON.$U$1])" office:value-type="string" office:string-value="{&quot;id&quot;:&quot;4-21&quot;,&quot;name&quot;:&quot;フレデリック・フランソワ・ショパン&quot;,&quot;displayName&quot;:&quot;フレデリック・フランソワ・ショパン&quot;,&quot;kana&quot;:&quot;ふれでりっくふらんそわしょぱん&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rarity&quot;:1,&quot;type&quot;:1,&quot;level&quot;:1,&quot;color&quot;:2,&quot;term&quot;:0,&quot;trait&quot;:4,&quot;power&quot;:1000,&quot;legacy&quot;:4,&quot;anyNumCopies&quot;:false,&quot;orderTable&quot;:330,&quot;orderDeck&quot;:12}," calcext:value-type="string">
            <text:p>{"id":"4-21","name":"フレデリック・フランソワ・ショパン","displayName":"フレデリック・フランソワ・ショパン","kana":"ふれでりっくふらんそわしょぱん","traitText":"音楽","ruleText":"戦場に置かれたとき、自分の戦場のイジン1体かガーディアン1体を寝かせる。¶ブロック+2000","legacyText":"1ドローする","imageUrl":"https://one-draw.jp/ijinden/cardlist/004/card/04_021.png","expansion":45,"rarity":1,"type":1,"level":1,"color":2,"term":0,"trait":4,"power":1000,"legacy":4,"anyNumCopies":false,"orderTable":330,"orderDeck":12},</text:p>
          </table:table-cell>
          <table:table-cell table:number-columns-repeated="16356"/>
        </table:table-row>
        <table:table-row table:style-name="ro2">
          <table:table-cell table:style-name="ce11" office:value-type="float" office:value="331" calcext:value-type="float">
            <text:p>331</text:p>
          </table:table-cell>
          <table:table-cell table:style-name="ce11" office:value-type="float" office:value="104" calcext:value-type="float">
            <text:p>104</text:p>
          </table:table-cell>
          <table:table-cell table:style-name="ce21" office:value-type="string" calcext:value-type="string">
            <text:p>4-22</text:p>
          </table:table-cell>
          <table:table-cell table:style-name="ce21" office:value-type="float" office:value="22" calcext:value-type="float">
            <text:p>22</text:p>
          </table:table-cell>
          <table:table-cell table:style-name="ce11" office:value-type="string" calcext:value-type="string">
            <text:p>ピョートル・イリイチ・チャイコフスキー</text:p>
          </table:table-cell>
          <table:table-cell table:style-name="ce11" table:formula="of:=[.E332]" office:value-type="string" office:string-value="ピョートル・イリイチ・チャイコフスキー" calcext:value-type="string">
            <text:p>ピョートル・イリイチ・チャイコフスキー</text:p>
          </table:table-cell>
          <table:table-cell table:style-name="ce11" office:value-type="string" calcext:value-type="string">
            <text:p>ぴょーとるいりいちちゃいこふすきー</text:p>
          </table:table-cell>
          <table:table-cell table:style-name="ce11" office:value-type="string" calcext:value-type="string">
            <text:p>第４弾ブースターパック</text:p>
          </table:table-cell>
          <table:table-cell table:style-name="ce11" table:formula="of:=VLOOKUP([.H332];[$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32];[$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2];[$種類番号.$A$1:$種類番号.$B$4];2;0)" office:value-type="float" office:value="1" calcext:value-type="float">
            <text:p>1</text:p>
          </table:table-cell>
          <table:table-cell table:style-name="ce11" office:value-type="string" calcext:value-type="string">
            <text:p>青</text:p>
          </table:table-cell>
          <table:table-cell table:style-name="ce11" table:formula="of:=VLOOKUP([.N332];[$色番号.$A$1:$色番号.$B$10];2;0)" office:value-type="float" office:value="2" calcext:value-type="float">
            <text:p>2</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2];[$能力語番号.$A$1:$能力語番号.$B$11];2;0);0)" office:value-type="float" office:value="0" calcext:value-type="float">
            <text:p>0</text:p>
          </table:table-cell>
          <table:table-cell office:value-type="string" calcext:value-type="string">
            <text:p>音楽</text:p>
          </table:table-cell>
          <table:table-cell table:style-name="ce11" table:formula="of:=IFERROR(VLOOKUP([.$T332];[$特性番号.$A$1:$特性番号.$B$8];2;0);0)" office:value-type="float" office:value="4" calcext:value-type="float">
            <text:p>4</text:p>
          </table:table-cell>
          <table:table-cell table:style-name="ce11" office:value-type="string" calcext:value-type="string">
            <text:p>戦場に置かれたとき、自分の戦場のイジン1体かガーディアン1体を寝かせて、1ドローする。</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3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2.png</text:p>
          </table:table-cell>
          <table:table-cell table:style-name="ce11" table:formula="of:=CONCATENATE([$JSON.$A$1];[.$C332];[$JSON.$B$1];[.$E332];[$JSON.$C$1];[.F332];[$JSON.$D$1];[.$G332];[$JSON.$E$1];IF(ISNA([.$T332]);&quot;null&quot;;&quot;&quot;&quot;&quot;&amp;[.$T332]&amp;&quot;&quot;&quot;&quot;);[$JSON.$F$1];[.$V332];[$JSON.$G$1];IF(ISNA([.$X332]);&quot;null&quot;;&quot;&quot;&quot;&quot;&amp;[.$X332]&amp;&quot;&quot;&quot;&quot;);[$JSON.$H$1];[.$AA332];[$JSON.$I$1];[.$I332];[$JSON.$J$1];[.K332];[$JSON.$K$1];[.$M332];[$JSON.$L$1];[.$P332];[$JSON.$M$1];[.$O332];[$JSON.$N$1];[.$S332];[$JSON.$O$1];[.$U332];[$JSON.$P$1];IF(ISNA([.$W332]);&quot;null&quot;;[.$W332]);[$JSON.$Q$1];[.$Y332];[$JSON.$R$1];IF([.$Z332];&quot;true&quot;;&quot;false&quot;);[$JSON.$S$1];[.$A332];[$JSON.$T$1];[.$B332];[$JSON.$U$1])" office:value-type="string" office:string-value="{&quot;id&quot;:&quot;4-22&quot;,&quot;name&quot;:&quot;ピョートル・イリイチ・チャイコフスキー&quot;,&quot;displayName&quot;:&quot;ピョートル・イリイチ・チャイコフスキー&quot;,&quot;kana&quot;:&quot;ぴょーとるいりいちちゃいこふすき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rarity&quot;:2,&quot;type&quot;:1,&quot;level&quot;:3,&quot;color&quot;:2,&quot;term&quot;:0,&quot;trait&quot;:4,&quot;power&quot;:3000,&quot;legacy&quot;:4,&quot;anyNumCopies&quot;:false,&quot;orderTable&quot;:331,&quot;orderDeck&quot;:104}," calcext:value-type="string">
            <text:p>{"id":"4-22","name":"ピョートル・イリイチ・チャイコフスキー","displayName":"ピョートル・イリイチ・チャイコフスキー","kana":"ぴょーとるいりいちちゃいこふすきー","traitText":"音楽","ruleText":"戦場に置かれたとき、自分の戦場のイジン1体かガーディアン1体を寝かせて、1ドローする。","legacyText":"1ドローする","imageUrl":"https://one-draw.jp/ijinden/cardlist/004/card/04_022.png","expansion":45,"rarity":2,"type":1,"level":3,"color":2,"term":0,"trait":4,"power":3000,"legacy":4,"anyNumCopies":false,"orderTable":331,"orderDeck":104},</text:p>
          </table:table-cell>
          <table:table-cell table:number-columns-repeated="16356"/>
        </table:table-row>
        <table:table-row table:style-name="ro2">
          <table:table-cell table:style-name="ce11" office:value-type="float" office:value="332" calcext:value-type="float">
            <text:p>332</text:p>
          </table:table-cell>
          <table:table-cell table:style-name="ce11" office:value-type="float" office:value="269" calcext:value-type="float">
            <text:p>269</text:p>
          </table:table-cell>
          <table:table-cell table:style-name="ce21" office:value-type="string" calcext:value-type="string">
            <text:p>4-23</text:p>
          </table:table-cell>
          <table:table-cell table:style-name="ce21" office:value-type="float" office:value="23" calcext:value-type="float">
            <text:p>23</text:p>
          </table:table-cell>
          <table:table-cell table:style-name="ce11" office:value-type="string" calcext:value-type="string">
            <text:p>岩倉具視</text:p>
          </table:table-cell>
          <table:table-cell table:style-name="ce11" table:formula="of:=[.E333]" office:value-type="string" office:string-value="岩倉具視" calcext:value-type="string">
            <text:p>岩倉具視</text:p>
          </table:table-cell>
          <table:table-cell table:style-name="ce11" office:value-type="string" calcext:value-type="string">
            <text:p>いわくらともみ</text:p>
          </table:table-cell>
          <table:table-cell table:style-name="ce11" office:value-type="string" calcext:value-type="string">
            <text:p>第４弾ブースターパック</text:p>
          </table:table-cell>
          <table:table-cell table:style-name="ce11" table:formula="of:=VLOOKUP([.H333];[$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3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3];[$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3];[$色番号.$A$1:$色番号.$B$10];2;0)" office:value-type="float" office:value="4" calcext:value-type="float">
            <text:p>4</text:p>
          </table:table-cell>
          <table:table-cell table:style-name="ce11" office:value-type="float" office:value="7" calcext:value-type="float">
            <text:p>7</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33];[$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333];[$特性番号.$A$1:$特性番号.$B$8];2;0);0)" office:value-type="float" office:value="0" calcext:value-type="float">
            <text:p>0</text:p>
          </table:table-cell>
          <table:table-cell table:style-name="ce11" office:value-type="string" calcext:value-type="string">
            <text:p>トリプルプレッシャー¶航海 - アタッカーになったとき、相手の戦場の色1つにつき、1ドローして、自分の戦場のイジンすべてを起こす。</text:p>
          </table:table-cell>
          <table:table-cell table:style-name="ce11"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333];[$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3.png</text:p>
          </table:table-cell>
          <table:table-cell table:style-name="ce11" table:formula="of:=CONCATENATE([$JSON.$A$1];[.$C333];[$JSON.$B$1];[.$E333];[$JSON.$C$1];[.F333];[$JSON.$D$1];[.$G333];[$JSON.$E$1];IF(ISNA([.$T333]);&quot;null&quot;;&quot;&quot;&quot;&quot;&amp;[.$T333]&amp;&quot;&quot;&quot;&quot;);[$JSON.$F$1];[.$V333];[$JSON.$G$1];IF(ISNA([.$X333]);&quot;null&quot;;&quot;&quot;&quot;&quot;&amp;[.$X333]&amp;&quot;&quot;&quot;&quot;);[$JSON.$H$1];[.$AA333];[$JSON.$I$1];[.$I333];[$JSON.$J$1];[.K333];[$JSON.$K$1];[.$M333];[$JSON.$L$1];[.$P333];[$JSON.$M$1];[.$O333];[$JSON.$N$1];[.$S333];[$JSON.$O$1];[.$U333];[$JSON.$P$1];IF(ISNA([.$W333]);&quot;null&quot;;[.$W333]);[$JSON.$Q$1];[.$Y333];[$JSON.$R$1];IF([.$Z333];&quot;true&quot;;&quot;false&quot;);[$JSON.$S$1];[.$A333];[$JSON.$T$1];[.$B333];[$JSON.$U$1])" office:value-type="string" office:string-value="{&quot;id&quot;:&quot;4-23&quot;,&quot;name&quot;:&quot;岩倉具視&quot;,&quot;displayName&quot;:&quot;岩倉具視&quot;,&quot;kana&quot;:&quot;いわくらともみ&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rarity&quot;:2,&quot;type&quot;:1,&quot;level&quot;:7,&quot;color&quot;:4,&quot;term&quot;:1,&quot;trait&quot;:0,&quot;power&quot;:6000,&quot;legacy&quot;:0,&quot;anyNumCopies&quot;:false,&quot;orderTable&quot;:332,&quot;orderDeck&quot;:269}," calcext:value-type="string">
            <text:p>{"id":"4-23","name":"岩倉具視","displayName":"岩倉具視","kana":"いわくらともみ","traitText":null,"ruleText":"トリプルプレッシャー¶航海 - アタッカーになったとき、相手の戦場の色1つにつき、1ドローして、自分の戦場のイジンすべてを起こす。","legacyText":null,"imageUrl":"https://one-draw.jp/ijinden/cardlist/004/card/04_023.png","expansion":45,"rarity":2,"type":1,"level":7,"color":4,"term":1,"trait":0,"power":6000,"legacy":0,"anyNumCopies":false,"orderTable":332,"orderDeck":269},</text:p>
          </table:table-cell>
          <table:table-cell table:number-columns-repeated="16356"/>
        </table:table-row>
        <table:table-row table:style-name="ro2">
          <table:table-cell table:style-name="ce11" office:value-type="float" office:value="333" calcext:value-type="float">
            <text:p>333</text:p>
          </table:table-cell>
          <table:table-cell table:style-name="ce11" office:value-type="float" office:value="115" calcext:value-type="float">
            <text:p>115</text:p>
          </table:table-cell>
          <table:table-cell table:style-name="ce21" office:value-type="string" calcext:value-type="string">
            <text:p>4-24</text:p>
          </table:table-cell>
          <table:table-cell table:style-name="ce21" office:value-type="float" office:value="24" calcext:value-type="float">
            <text:p>24</text:p>
          </table:table-cell>
          <table:table-cell table:style-name="ce11" office:value-type="string" calcext:value-type="string">
            <text:p>クララ・ヨゼフィーネ・シューマン</text:p>
          </table:table-cell>
          <table:table-cell table:style-name="ce11" table:formula="of:=[.E334]" office:value-type="string" office:string-value="クララ・ヨゼフィーネ・シューマン" calcext:value-type="string">
            <text:p>クララ・ヨゼフィーネ・シューマン</text:p>
          </table:table-cell>
          <table:table-cell table:style-name="ce11" office:value-type="string" calcext:value-type="string">
            <text:p>くららよぜふぃーねしゅーまん</text:p>
          </table:table-cell>
          <table:table-cell table:style-name="ce11" office:value-type="string" calcext:value-type="string">
            <text:p>第４弾ブースターパック</text:p>
          </table:table-cell>
          <table:table-cell table:style-name="ce11" table:formula="of:=VLOOKUP([.H334];[$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3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4];[$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4];[$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4];[$能力語番号.$A$1:$能力語番号.$B$11];2;0);0)" office:value-type="float" office:value="0" calcext:value-type="float">
            <text:p>0</text:p>
          </table:table-cell>
          <table:table-cell office:value-type="string" calcext:value-type="string">
            <text:p>音楽</text:p>
          </table:table-cell>
          <table:table-cell table:style-name="ce11" table:formula="of:=IFERROR(VLOOKUP([.$T334];[$特性番号.$A$1:$特性番号.$B$8];2;0);0)" office:value-type="float" office:value="4" calcext:value-type="float">
            <text:p>4</text:p>
          </table:table-cell>
          <table:table-cell table:style-name="ce11" office:value-type="string" calcext:value-type="string">
            <text:p>「音楽」イジンが戦場に置かれたとき、これを寝かせて発動できる。戦場の寝ているイジン1体か寝ているガーディアン1体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4.png</text:p>
          </table:table-cell>
          <table:table-cell table:style-name="ce11" table:formula="of:=CONCATENATE([$JSON.$A$1];[.$C334];[$JSON.$B$1];[.$E334];[$JSON.$C$1];[.F334];[$JSON.$D$1];[.$G334];[$JSON.$E$1];IF(ISNA([.$T334]);&quot;null&quot;;&quot;&quot;&quot;&quot;&amp;[.$T334]&amp;&quot;&quot;&quot;&quot;);[$JSON.$F$1];[.$V334];[$JSON.$G$1];IF(ISNA([.$X334]);&quot;null&quot;;&quot;&quot;&quot;&quot;&amp;[.$X334]&amp;&quot;&quot;&quot;&quot;);[$JSON.$H$1];[.$AA334];[$JSON.$I$1];[.$I334];[$JSON.$J$1];[.K334];[$JSON.$K$1];[.$M334];[$JSON.$L$1];[.$P334];[$JSON.$M$1];[.$O334];[$JSON.$N$1];[.$S334];[$JSON.$O$1];[.$U334];[$JSON.$P$1];IF(ISNA([.$W334]);&quot;null&quot;;[.$W334]);[$JSON.$Q$1];[.$Y334];[$JSON.$R$1];IF([.$Z334];&quot;true&quot;;&quot;false&quot;);[$JSON.$S$1];[.$A334];[$JSON.$T$1];[.$B334];[$JSON.$U$1])" office:value-type="string" office:string-value="{&quot;id&quot;:&quot;4-24&quot;,&quot;name&quot;:&quot;クララ・ヨゼフィーネ・シューマン&quot;,&quot;displayName&quot;:&quot;クララ・ヨゼフィーネ・シューマン&quot;,&quot;kana&quot;:&quot;くららよぜふぃーねしゅーまん&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rarity&quot;:1,&quot;type&quot;:1,&quot;level&quot;:3,&quot;color&quot;:4,&quot;term&quot;:0,&quot;trait&quot;:4,&quot;power&quot;:2000,&quot;legacy&quot;:4,&quot;anyNumCopies&quot;:false,&quot;orderTable&quot;:333,&quot;orderDeck&quot;:115}," calcext:value-type="string">
            <text:p>{"id":"4-24","name":"クララ・ヨゼフィーネ・シューマン","displayName":"クララ・ヨゼフィーネ・シューマン","kana":"くららよぜふぃーねしゅーまん","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rarity":1,"type":1,"level":3,"color":4,"term":0,"trait":4,"power":2000,"legacy":4,"anyNumCopies":false,"orderTable":333,"orderDeck":115},</text:p>
          </table:table-cell>
          <table:table-cell table:number-columns-repeated="16356"/>
        </table:table-row>
        <table:table-row table:style-name="ro2">
          <table:table-cell table:style-name="ce11" office:value-type="float" office:value="334" calcext:value-type="float">
            <text:p>334</text:p>
          </table:table-cell>
          <table:table-cell table:style-name="ce11" office:value-type="float" office:value="212" calcext:value-type="float">
            <text:p>212</text:p>
          </table:table-cell>
          <table:table-cell table:style-name="ce21" office:value-type="string" calcext:value-type="string">
            <text:p>4-25</text:p>
          </table:table-cell>
          <table:table-cell table:style-name="ce21" office:value-type="float" office:value="25" calcext:value-type="float">
            <text:p>25</text:p>
          </table:table-cell>
          <table:table-cell table:style-name="ce11" office:value-type="string" calcext:value-type="string">
            <text:p>間宮林蔵</text:p>
          </table:table-cell>
          <table:table-cell table:style-name="ce11" table:formula="of:=[.E335]" office:value-type="string" office:string-value="間宮林蔵" calcext:value-type="string">
            <text:p>間宮林蔵</text:p>
          </table:table-cell>
          <table:table-cell table:style-name="ce11" office:value-type="string" calcext:value-type="string">
            <text:p>まみやりんぞう</text:p>
          </table:table-cell>
          <table:table-cell table:style-name="ce11" office:value-type="string" calcext:value-type="string">
            <text:p>第４弾ブースターパック</text:p>
          </table:table-cell>
          <table:table-cell table:style-name="ce11" table:formula="of:=VLOOKUP([.H335];[$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35];[$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5];[$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5];[$色番号.$A$1:$色番号.$B$10];2;0)" office:value-type="float" office:value="4" calcext:value-type="float">
            <text:p>4</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35];[$特性番号.$A$1:$特性番号.$B$8];2;0);0)" office:value-type="float" office:value="0" calcext:value-type="float">
            <text:p>0</text:p>
          </table:table-cell>
          <table:table-cell table:style-name="ce11" office:value-type="string" calcext:value-type="string">
            <text:p>戦場に置かれたとき、戦場のハイケイの色1つにつき1つまで、戦場か魔力ゾーンの裏のカードを手札に戻す。</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3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5.png</text:p>
          </table:table-cell>
          <table:table-cell table:style-name="ce11" table:formula="of:=CONCATENATE([$JSON.$A$1];[.$C335];[$JSON.$B$1];[.$E335];[$JSON.$C$1];[.F335];[$JSON.$D$1];[.$G335];[$JSON.$E$1];IF(ISNA([.$T335]);&quot;null&quot;;&quot;&quot;&quot;&quot;&amp;[.$T335]&amp;&quot;&quot;&quot;&quot;);[$JSON.$F$1];[.$V335];[$JSON.$G$1];IF(ISNA([.$X335]);&quot;null&quot;;&quot;&quot;&quot;&quot;&amp;[.$X335]&amp;&quot;&quot;&quot;&quot;);[$JSON.$H$1];[.$AA335];[$JSON.$I$1];[.$I335];[$JSON.$J$1];[.K335];[$JSON.$K$1];[.$M335];[$JSON.$L$1];[.$P335];[$JSON.$M$1];[.$O335];[$JSON.$N$1];[.$S335];[$JSON.$O$1];[.$U335];[$JSON.$P$1];IF(ISNA([.$W335]);&quot;null&quot;;[.$W335]);[$JSON.$Q$1];[.$Y335];[$JSON.$R$1];IF([.$Z335];&quot;true&quot;;&quot;false&quot;);[$JSON.$S$1];[.$A335];[$JSON.$T$1];[.$B335];[$JSON.$U$1])" office:value-type="string" office:string-value="{&quot;id&quot;:&quot;4-25&quot;,&quot;name&quot;:&quot;間宮林蔵&quot;,&quot;displayName&quot;:&quot;間宮林蔵&quot;,&quot;kana&quot;:&quot;まみやりんぞう&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rarity&quot;:1,&quot;type&quot;:1,&quot;level&quot;:5,&quot;color&quot;:4,&quot;term&quot;:0,&quot;trait&quot;:0,&quot;power&quot;:5000,&quot;legacy&quot;:0,&quot;anyNumCopies&quot;:false,&quot;orderTable&quot;:334,&quot;orderDeck&quot;:212}," calcext:value-type="string">
            <text:p>{"id":"4-25","name":"間宮林蔵","displayName":"間宮林蔵","kana":"まみやりんぞう","traitText":null,"ruleText":"戦場に置かれたとき、戦場のハイケイの色1つにつき1つまで、戦場か魔力ゾーンの裏のカードを手札に戻す。","legacyText":null,"imageUrl":"https://one-draw.jp/ijinden/cardlist/004/card/04_025.png","expansion":45,"rarity":1,"type":1,"level":5,"color":4,"term":0,"trait":0,"power":5000,"legacy":0,"anyNumCopies":false,"orderTable":334,"orderDeck":212},</text:p>
          </table:table-cell>
          <table:table-cell table:number-columns-repeated="16356"/>
        </table:table-row>
        <table:table-row table:style-name="ro2">
          <table:table-cell table:style-name="ce11" office:value-type="float" office:value="335" calcext:value-type="float">
            <text:p>335</text:p>
          </table:table-cell>
          <table:table-cell table:style-name="ce11" office:value-type="float" office:value="63" calcext:value-type="float">
            <text:p>63</text:p>
          </table:table-cell>
          <table:table-cell table:style-name="ce21" office:value-type="string" calcext:value-type="string">
            <text:p>4-26</text:p>
          </table:table-cell>
          <table:table-cell table:style-name="ce21" office:value-type="float" office:value="26" calcext:value-type="float">
            <text:p>26</text:p>
          </table:table-cell>
          <table:table-cell table:style-name="ce11" office:value-type="string" calcext:value-type="string">
            <text:p>徳川斉昭</text:p>
          </table:table-cell>
          <table:table-cell table:style-name="ce11" table:formula="of:=[.E336]" office:value-type="string" office:string-value="徳川斉昭" calcext:value-type="string">
            <text:p>徳川斉昭</text:p>
          </table:table-cell>
          <table:table-cell table:style-name="ce11" office:value-type="string" calcext:value-type="string">
            <text:p>とくがわなりあき</text:p>
          </table:table-cell>
          <table:table-cell table:style-name="ce11" office:value-type="string" calcext:value-type="string">
            <text:p>第４弾ブースターパック</text:p>
          </table:table-cell>
          <table:table-cell table:style-name="ce11" table:formula="of:=VLOOKUP([.H336];[$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3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6];[$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6];[$色番号.$A$1:$色番号.$B$10];2;0)" office:value-type="float" office:value="4" calcext:value-type="float">
            <text:p>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36];[$特性番号.$A$1:$特性番号.$B$8];2;0);0)" office:value-type="float" office:value="0" calcext:value-type="float">
            <text:p>0</text:p>
          </table:table-cell>
          <table:table-cell table:style-name="ce11" office:value-type="string" calcext:value-type="string">
            <text:p>この能力はターンに1回しか発動しない。戦場のイジンが寝たときに発動できる。ターンプレイヤーは1ドローする。</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3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6.png</text:p>
          </table:table-cell>
          <table:table-cell table:style-name="ce11" table:formula="of:=CONCATENATE([$JSON.$A$1];[.$C336];[$JSON.$B$1];[.$E336];[$JSON.$C$1];[.F336];[$JSON.$D$1];[.$G336];[$JSON.$E$1];IF(ISNA([.$T336]);&quot;null&quot;;&quot;&quot;&quot;&quot;&amp;[.$T336]&amp;&quot;&quot;&quot;&quot;);[$JSON.$F$1];[.$V336];[$JSON.$G$1];IF(ISNA([.$X336]);&quot;null&quot;;&quot;&quot;&quot;&quot;&amp;[.$X336]&amp;&quot;&quot;&quot;&quot;);[$JSON.$H$1];[.$AA336];[$JSON.$I$1];[.$I336];[$JSON.$J$1];[.K336];[$JSON.$K$1];[.$M336];[$JSON.$L$1];[.$P336];[$JSON.$M$1];[.$O336];[$JSON.$N$1];[.$S336];[$JSON.$O$1];[.$U336];[$JSON.$P$1];IF(ISNA([.$W336]);&quot;null&quot;;[.$W336]);[$JSON.$Q$1];[.$Y336];[$JSON.$R$1];IF([.$Z336];&quot;true&quot;;&quot;false&quot;);[$JSON.$S$1];[.$A336];[$JSON.$T$1];[.$B336];[$JSON.$U$1])" office:value-type="string" office:string-value="{&quot;id&quot;:&quot;4-26&quot;,&quot;name&quot;:&quot;徳川斉昭&quot;,&quot;displayName&quot;:&quot;徳川斉昭&quot;,&quot;kana&quot;:&quot;とくがわなりあき&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rarity&quot;:1,&quot;type&quot;:1,&quot;level&quot;:2,&quot;color&quot;:4,&quot;term&quot;:0,&quot;trait&quot;:0,&quot;power&quot;:2000,&quot;legacy&quot;:4,&quot;anyNumCopies&quot;:false,&quot;orderTable&quot;:335,&quot;orderDeck&quot;:63}," calcext:value-type="string">
            <text:p>{"id":"4-26","name":"徳川斉昭","displayName":"徳川斉昭","kana":"とくがわなりあき","traitText":null,"ruleText":"この能力はターンに1回しか発動しない。戦場のイジンが寝たときに発動できる。ターンプレイヤーは1ドローする。","legacyText":"1ドローする","imageUrl":"https://one-draw.jp/ijinden/cardlist/004/card/04_026.png","expansion":45,"rarity":1,"type":1,"level":2,"color":4,"term":0,"trait":0,"power":2000,"legacy":4,"anyNumCopies":false,"orderTable":335,"orderDeck":63},</text:p>
          </table:table-cell>
          <table:table-cell table:number-columns-repeated="16356"/>
        </table:table-row>
        <table:table-row table:style-name="ro2">
          <table:table-cell table:style-name="ce11" office:value-type="float" office:value="336" calcext:value-type="float">
            <text:p>336</text:p>
          </table:table-cell>
          <table:table-cell table:style-name="ce11" office:value-type="float" office:value="163" calcext:value-type="float">
            <text:p>163</text:p>
          </table:table-cell>
          <table:table-cell table:style-name="ce21" office:value-type="string" calcext:value-type="string">
            <text:p>4-27</text:p>
          </table:table-cell>
          <table:table-cell table:style-name="ce21" office:value-type="float" office:value="27" calcext:value-type="float">
            <text:p>27</text:p>
          </table:table-cell>
          <table:table-cell table:style-name="ce11" office:value-type="string" calcext:value-type="string">
            <text:p>鈴木春信</text:p>
          </table:table-cell>
          <table:table-cell table:style-name="ce11" table:formula="of:=[.E337]" office:value-type="string" office:string-value="鈴木春信" calcext:value-type="string">
            <text:p>鈴木春信</text:p>
          </table:table-cell>
          <table:table-cell table:style-name="ce11" office:value-type="string" calcext:value-type="string">
            <text:p>すずきはるのぶ</text:p>
          </table:table-cell>
          <table:table-cell table:style-name="ce11" office:value-type="string" calcext:value-type="string">
            <text:p>第４弾ブースターパック</text:p>
          </table:table-cell>
          <table:table-cell table:style-name="ce11" table:formula="of:=VLOOKUP([.H337];[$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37];[$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37];[$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7];[$色番号.$A$1:$色番号.$B$10];2;0)" office:value-type="float" office:value="4" calcext:value-type="float">
            <text:p>4</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7];[$能力語番号.$A$1:$能力語番号.$B$11];2;0);0)" office:value-type="float" office:value="0" calcext:value-type="float">
            <text:p>0</text:p>
          </table:table-cell>
          <table:table-cell office:value-type="string" calcext:value-type="string">
            <text:p>美術</text:p>
          </table:table-cell>
          <table:table-cell table:style-name="ce11" table:formula="of:=IFERROR(VLOOKUP([.$T337];[$特性番号.$A$1:$特性番号.$B$8];2;0);0)" office:value-type="float" office:value="2" calcext:value-type="float">
            <text:p>2</text:p>
          </table:table-cell>
          <table:table-cell table:style-name="ce11" office:value-type="string" calcext:value-type="string">
            <text:p>戦場に置かれたとき、自分の魔力ゾーンの裏のカード1つを手札に戻して発動できる。自分の山札の上から1枚を裏のまま魔力ゾーンに置く。</text:p>
          </table:table-cell>
          <table:table-cell table:style-name="ce11" office:value-type="float" office:value="3000" calcext:value-type="float">
            <text:p>3000</text:p>
          </table:table-cell>
          <table:table-cell table:style-name="ce25" office:value-type="string" calcext:value-type="string">
            <text:p>1ドローする</text:p>
          </table:table-cell>
          <table:table-cell table:style-name="ce11" table:formula="of:=IFERROR(VLOOKUP([.$X337];[$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7.png</text:p>
          </table:table-cell>
          <table:table-cell table:style-name="ce11" table:formula="of:=CONCATENATE([$JSON.$A$1];[.$C337];[$JSON.$B$1];[.$E337];[$JSON.$C$1];[.F337];[$JSON.$D$1];[.$G337];[$JSON.$E$1];IF(ISNA([.$T337]);&quot;null&quot;;&quot;&quot;&quot;&quot;&amp;[.$T337]&amp;&quot;&quot;&quot;&quot;);[$JSON.$F$1];[.$V337];[$JSON.$G$1];IF(ISNA([.$X337]);&quot;null&quot;;&quot;&quot;&quot;&quot;&amp;[.$X337]&amp;&quot;&quot;&quot;&quot;);[$JSON.$H$1];[.$AA337];[$JSON.$I$1];[.$I337];[$JSON.$J$1];[.K337];[$JSON.$K$1];[.$M337];[$JSON.$L$1];[.$P337];[$JSON.$M$1];[.$O337];[$JSON.$N$1];[.$S337];[$JSON.$O$1];[.$U337];[$JSON.$P$1];IF(ISNA([.$W337]);&quot;null&quot;;[.$W337]);[$JSON.$Q$1];[.$Y337];[$JSON.$R$1];IF([.$Z337];&quot;true&quot;;&quot;false&quot;);[$JSON.$S$1];[.$A337];[$JSON.$T$1];[.$B337];[$JSON.$U$1])" office:value-type="string" office:string-value="{&quot;id&quot;:&quot;4-27&quot;,&quot;name&quot;:&quot;鈴木春信&quot;,&quot;displayName&quot;:&quot;鈴木春信&quot;,&quot;kana&quot;:&quot;すずきはるのぶ&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rarity&quot;:1,&quot;type&quot;:1,&quot;level&quot;:4,&quot;color&quot;:4,&quot;term&quot;:0,&quot;trait&quot;:2,&quot;power&quot;:3000,&quot;legacy&quot;:4,&quot;anyNumCopies&quot;:false,&quot;orderTable&quot;:336,&quot;orderDeck&quot;:163}," calcext:value-type="string">
            <text:p>{"id":"4-27","name":"鈴木春信","displayName":"鈴木春信","kana":"すずきはるのぶ","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rarity":1,"type":1,"level":4,"color":4,"term":0,"trait":2,"power":3000,"legacy":4,"anyNumCopies":false,"orderTable":336,"orderDeck":163},</text:p>
          </table:table-cell>
          <table:table-cell table:number-columns-repeated="16356"/>
        </table:table-row>
        <table:table-row table:style-name="ro2">
          <table:table-cell table:style-name="ce11" office:value-type="float" office:value="337" calcext:value-type="float">
            <text:p>337</text:p>
          </table:table-cell>
          <table:table-cell table:style-name="ce11" office:value-type="float" office:value="116" calcext:value-type="float">
            <text:p>116</text:p>
          </table:table-cell>
          <table:table-cell table:style-name="ce21" office:value-type="string" calcext:value-type="string">
            <text:p>4-28</text:p>
          </table:table-cell>
          <table:table-cell table:style-name="ce21" office:value-type="float" office:value="28" calcext:value-type="float">
            <text:p>28</text:p>
          </table:table-cell>
          <table:table-cell table:style-name="ce11" office:value-type="string" calcext:value-type="string">
            <text:p>歌川広重</text:p>
          </table:table-cell>
          <table:table-cell table:style-name="ce11" table:formula="of:=[.E338]" office:value-type="string" office:string-value="歌川広重" calcext:value-type="string">
            <text:p>歌川広重</text:p>
          </table:table-cell>
          <table:table-cell table:style-name="ce11" office:value-type="string" calcext:value-type="string">
            <text:p>うたがわひろしげ</text:p>
          </table:table-cell>
          <table:table-cell table:style-name="ce11" office:value-type="string" calcext:value-type="string">
            <text:p>第４弾ブースターパック</text:p>
          </table:table-cell>
          <table:table-cell table:style-name="ce11" table:formula="of:=VLOOKUP([.H338];[$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38];[$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8];[$種類番号.$A$1:$種類番号.$B$4];2;0)" office:value-type="float" office:value="1" calcext:value-type="float">
            <text:p>1</text:p>
          </table:table-cell>
          <table:table-cell table:style-name="ce11" office:value-type="string" calcext:value-type="string">
            <text:p>緑</text:p>
          </table:table-cell>
          <table:table-cell table:style-name="ce11" table:formula="of:=VLOOKUP([.N338];[$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8];[$能力語番号.$A$1:$能力語番号.$B$11];2;0);0)" office:value-type="float" office:value="0" calcext:value-type="float">
            <text:p>0</text:p>
          </table:table-cell>
          <table:table-cell office:value-type="string" calcext:value-type="string">
            <text:p>美術</text:p>
          </table:table-cell>
          <table:table-cell table:style-name="ce11" table:formula="of:=IFERROR(VLOOKUP([.$T338];[$特性番号.$A$1:$特性番号.$B$8];2;0);0)" office:value-type="float" office:value="2" calcext:value-type="float">
            <text:p>2</text:p>
          </table:table-cell>
          <table:table-cell table:style-name="ce11" office:value-type="string" calcext:value-type="string">
            <text:p>戦場に置かれたとき、2ドローして、自分の手札のカード2つか「美術」カード1つを墓地に置く。</text:p>
          </table:table-cell>
          <table:table-cell table:style-name="ce11" office:value-type="float" office:value="1000" calcext:value-type="float">
            <text:p>1000</text:p>
          </table:table-cell>
          <table:table-cell table:style-name="ce25" office:value-type="string" calcext:value-type="string">
            <text:p>1ドローする</text:p>
          </table:table-cell>
          <table:table-cell table:style-name="ce11" table:formula="of:=IFERROR(VLOOKUP([.$X33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8.png</text:p>
          </table:table-cell>
          <table:table-cell table:style-name="ce11" table:formula="of:=CONCATENATE([$JSON.$A$1];[.$C338];[$JSON.$B$1];[.$E338];[$JSON.$C$1];[.F338];[$JSON.$D$1];[.$G338];[$JSON.$E$1];IF(ISNA([.$T338]);&quot;null&quot;;&quot;&quot;&quot;&quot;&amp;[.$T338]&amp;&quot;&quot;&quot;&quot;);[$JSON.$F$1];[.$V338];[$JSON.$G$1];IF(ISNA([.$X338]);&quot;null&quot;;&quot;&quot;&quot;&quot;&amp;[.$X338]&amp;&quot;&quot;&quot;&quot;);[$JSON.$H$1];[.$AA338];[$JSON.$I$1];[.$I338];[$JSON.$J$1];[.K338];[$JSON.$K$1];[.$M338];[$JSON.$L$1];[.$P338];[$JSON.$M$1];[.$O338];[$JSON.$N$1];[.$S338];[$JSON.$O$1];[.$U338];[$JSON.$P$1];IF(ISNA([.$W338]);&quot;null&quot;;[.$W338]);[$JSON.$Q$1];[.$Y338];[$JSON.$R$1];IF([.$Z338];&quot;true&quot;;&quot;false&quot;);[$JSON.$S$1];[.$A338];[$JSON.$T$1];[.$B338];[$JSON.$U$1])" office:value-type="string" office:string-value="{&quot;id&quot;:&quot;4-28&quot;,&quot;name&quot;:&quot;歌川広重&quot;,&quot;displayName&quot;:&quot;歌川広重&quot;,&quot;kana&quot;:&quot;うたがわひろしげ&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rarity&quot;:2,&quot;type&quot;:1,&quot;level&quot;:3,&quot;color&quot;:4,&quot;term&quot;:0,&quot;trait&quot;:2,&quot;power&quot;:1000,&quot;legacy&quot;:4,&quot;anyNumCopies&quot;:false,&quot;orderTable&quot;:337,&quot;orderDeck&quot;:116}," calcext:value-type="string">
            <text:p>{"id":"4-28","name":"歌川広重","displayName":"歌川広重","kana":"うたがわひろしげ","traitText":"美術","ruleText":"戦場に置かれたとき、2ドローして、自分の手札のカード2つか「美術」カード1つを墓地に置く。","legacyText":"1ドローする","imageUrl":"https://one-draw.jp/ijinden/cardlist/004/card/04_028.png","expansion":45,"rarity":2,"type":1,"level":3,"color":4,"term":0,"trait":2,"power":1000,"legacy":4,"anyNumCopies":false,"orderTable":337,"orderDeck":116},</text:p>
          </table:table-cell>
          <table:table-cell table:number-columns-repeated="16356"/>
        </table:table-row>
        <table:table-row table:style-name="ro2">
          <table:table-cell table:style-name="ce11" office:value-type="float" office:value="338" calcext:value-type="float">
            <text:p>338</text:p>
          </table:table-cell>
          <table:table-cell table:style-name="ce11" office:value-type="float" office:value="124" calcext:value-type="float">
            <text:p>124</text:p>
          </table:table-cell>
          <table:table-cell table:style-name="ce21" office:value-type="string" calcext:value-type="string">
            <text:p>4-29</text:p>
          </table:table-cell>
          <table:table-cell table:style-name="ce21" office:value-type="float" office:value="29" calcext:value-type="float">
            <text:p>29</text:p>
          </table:table-cell>
          <table:table-cell table:style-name="ce11" office:value-type="string" calcext:value-type="string">
            <text:p>松平容保</text:p>
          </table:table-cell>
          <table:table-cell table:style-name="ce11" table:formula="of:=[.E339]" office:value-type="string" office:string-value="松平容保" calcext:value-type="string">
            <text:p>松平容保</text:p>
          </table:table-cell>
          <table:table-cell table:style-name="ce11" office:value-type="string" calcext:value-type="string">
            <text:p>まつだいらかたもり</text:p>
          </table:table-cell>
          <table:table-cell table:style-name="ce11" office:value-type="string" calcext:value-type="string">
            <text:p>第４弾ブースターパック</text:p>
          </table:table-cell>
          <table:table-cell table:style-name="ce11" table:formula="of:=VLOOKUP([.H339];[$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39];[$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39];[$種類番号.$A$1:$種類番号.$B$4];2;0)" office:value-type="float" office:value="1" calcext:value-type="float">
            <text:p>1</text:p>
          </table:table-cell>
          <table:table-cell table:style-name="ce11" office:value-type="string" calcext:value-type="string">
            <text:p>黄</text:p>
          </table:table-cell>
          <table:table-cell table:style-name="ce11" table:formula="of:=VLOOKUP([.N339];[$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3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39];[$特性番号.$A$1:$特性番号.$B$8];2;0);0)" office:value-type="float" office:value="0" calcext:value-type="float">
            <text:p>0</text:p>
          </table:table-cell>
          <table:table-cell table:style-name="ce11" office:value-type="string" calcext:value-type="string">
            <text:p>スタンド¶戦場に置かれたとき、墓地のマリョクでないカード1つを山札の下に戻して発動できる。1ドローする。</text:p>
          </table:table-cell>
          <table:table-cell table:style-name="ce11" office:value-type="float" office:value="1000" calcext:value-type="float">
            <text:p>1000</text:p>
          </table:table-cell>
          <table:table-cell table:style-name="ce25" office:value-type="string" calcext:value-type="string">
            <text:p>喪神</text:p>
          </table:table-cell>
          <table:table-cell table:style-name="ce11" table:formula="of:=IFERROR(VLOOKUP([.$X339];[$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29.png</text:p>
          </table:table-cell>
          <table:table-cell table:style-name="ce11" table:formula="of:=CONCATENATE([$JSON.$A$1];[.$C339];[$JSON.$B$1];[.$E339];[$JSON.$C$1];[.F339];[$JSON.$D$1];[.$G339];[$JSON.$E$1];IF(ISNA([.$T339]);&quot;null&quot;;&quot;&quot;&quot;&quot;&amp;[.$T339]&amp;&quot;&quot;&quot;&quot;);[$JSON.$F$1];[.$V339];[$JSON.$G$1];IF(ISNA([.$X339]);&quot;null&quot;;&quot;&quot;&quot;&quot;&amp;[.$X339]&amp;&quot;&quot;&quot;&quot;);[$JSON.$H$1];[.$AA339];[$JSON.$I$1];[.$I339];[$JSON.$J$1];[.K339];[$JSON.$K$1];[.$M339];[$JSON.$L$1];[.$P339];[$JSON.$M$1];[.$O339];[$JSON.$N$1];[.$S339];[$JSON.$O$1];[.$U339];[$JSON.$P$1];IF(ISNA([.$W339]);&quot;null&quot;;[.$W339]);[$JSON.$Q$1];[.$Y339];[$JSON.$R$1];IF([.$Z339];&quot;true&quot;;&quot;false&quot;);[$JSON.$S$1];[.$A339];[$JSON.$T$1];[.$B339];[$JSON.$U$1])" office:value-type="string" office:string-value="{&quot;id&quot;:&quot;4-29&quot;,&quot;name&quot;:&quot;松平容保&quot;,&quot;displayName&quot;:&quot;松平容保&quot;,&quot;kana&quot;:&quot;まつだいらかたもり&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rarity&quot;:2,&quot;type&quot;:1,&quot;level&quot;:3,&quot;color&quot;:8,&quot;term&quot;:0,&quot;trait&quot;:0,&quot;power&quot;:1000,&quot;legacy&quot;:9,&quot;anyNumCopies&quot;:false,&quot;orderTable&quot;:338,&quot;orderDeck&quot;:124}," calcext:value-type="string">
            <text:p>{"id":"4-29","name":"松平容保","displayName":"松平容保","kana":"まつだいらかたもり","traitText":null,"ruleText":"スタンド¶戦場に置かれたとき、墓地のマリョクでないカード1つを山札の下に戻して発動できる。1ドローする。","legacyText":"喪神","imageUrl":"https://one-draw.jp/ijinden/cardlist/004/card/04_029.png","expansion":45,"rarity":2,"type":1,"level":3,"color":8,"term":0,"trait":0,"power":1000,"legacy":9,"anyNumCopies":false,"orderTable":338,"orderDeck":124},</text:p>
          </table:table-cell>
          <table:table-cell table:number-columns-repeated="16356"/>
        </table:table-row>
        <table:table-row table:style-name="ro2">
          <table:table-cell table:style-name="ce11" office:value-type="float" office:value="339" calcext:value-type="float">
            <text:p>339</text:p>
          </table:table-cell>
          <table:table-cell table:style-name="ce11" office:value-type="float" office:value="71" calcext:value-type="float">
            <text:p>71</text:p>
          </table:table-cell>
          <table:table-cell table:style-name="ce21" office:value-type="string" calcext:value-type="string">
            <text:p>4-30</text:p>
          </table:table-cell>
          <table:table-cell table:style-name="ce21" office:value-type="float" office:value="30" calcext:value-type="float">
            <text:p>30</text:p>
          </table:table-cell>
          <table:table-cell table:style-name="ce11" office:value-type="string" calcext:value-type="string">
            <text:p>新島八重</text:p>
          </table:table-cell>
          <table:table-cell table:style-name="ce11" table:formula="of:=[.E340]" office:value-type="string" office:string-value="新島八重" calcext:value-type="string">
            <text:p>新島八重</text:p>
          </table:table-cell>
          <table:table-cell table:style-name="ce11" office:value-type="string" calcext:value-type="string">
            <text:p>にいじまやえ</text:p>
          </table:table-cell>
          <table:table-cell table:style-name="ce11" office:value-type="string" calcext:value-type="string">
            <text:p>第４弾ブースターパック</text:p>
          </table:table-cell>
          <table:table-cell table:style-name="ce11" table:formula="of:=VLOOKUP([.H340];[$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4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0];[$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0];[$色番号.$A$1:$色番号.$B$10];2;0)" office:value-type="float" office:value="8" calcext:value-type="float">
            <text:p>8</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40];[$特性番号.$A$1:$特性番号.$B$8];2;0);0)" office:value-type="float" office:value="0" calcext:value-type="float">
            <text:p>0</text:p>
          </table:table-cell>
          <table:table-cell table:style-name="ce11" office:value-type="string" calcext:value-type="string">
            <text:p>これが戦場か墓地にいる間、手札のカードを墓地に置く効果を持つ、戦場の能力すべては、発動せず効果を発揮しない。</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340];[$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0.png</text:p>
          </table:table-cell>
          <table:table-cell table:style-name="ce11" table:formula="of:=CONCATENATE([$JSON.$A$1];[.$C340];[$JSON.$B$1];[.$E340];[$JSON.$C$1];[.F340];[$JSON.$D$1];[.$G340];[$JSON.$E$1];IF(ISNA([.$T340]);&quot;null&quot;;&quot;&quot;&quot;&quot;&amp;[.$T340]&amp;&quot;&quot;&quot;&quot;);[$JSON.$F$1];[.$V340];[$JSON.$G$1];IF(ISNA([.$X340]);&quot;null&quot;;&quot;&quot;&quot;&quot;&amp;[.$X340]&amp;&quot;&quot;&quot;&quot;);[$JSON.$H$1];[.$AA340];[$JSON.$I$1];[.$I340];[$JSON.$J$1];[.K340];[$JSON.$K$1];[.$M340];[$JSON.$L$1];[.$P340];[$JSON.$M$1];[.$O340];[$JSON.$N$1];[.$S340];[$JSON.$O$1];[.$U340];[$JSON.$P$1];IF(ISNA([.$W340]);&quot;null&quot;;[.$W340]);[$JSON.$Q$1];[.$Y340];[$JSON.$R$1];IF([.$Z340];&quot;true&quot;;&quot;false&quot;);[$JSON.$S$1];[.$A340];[$JSON.$T$1];[.$B340];[$JSON.$U$1])" office:value-type="string" office:string-value="{&quot;id&quot;:&quot;4-30&quot;,&quot;name&quot;:&quot;新島八重&quot;,&quot;displayName&quot;:&quot;新島八重&quot;,&quot;kana&quot;:&quot;にいじまやえ&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rarity&quot;:1,&quot;type&quot;:1,&quot;level&quot;:2,&quot;color&quot;:8,&quot;term&quot;:0,&quot;trait&quot;:0,&quot;power&quot;:1500,&quot;legacy&quot;:4,&quot;anyNumCopies&quot;:false,&quot;orderTable&quot;:339,&quot;orderDeck&quot;:71}," calcext:value-type="string">
            <text:p>{"id":"4-30","name":"新島八重","displayName":"新島八重","kana":"にいじまやえ","traitText":null,"ruleText":"これが戦場か墓地にいる間、手札のカードを墓地に置く効果を持つ、戦場の能力すべては、発動せず効果を発揮しない。","legacyText":"1ドローする","imageUrl":"https://one-draw.jp/ijinden/cardlist/004/card/04_030.png","expansion":45,"rarity":1,"type":1,"level":2,"color":8,"term":0,"trait":0,"power":1500,"legacy":4,"anyNumCopies":false,"orderTable":339,"orderDeck":71},</text:p>
          </table:table-cell>
          <table:table-cell table:number-columns-repeated="16356"/>
        </table:table-row>
        <table:table-row table:style-name="ro2">
          <table:table-cell table:style-name="ce11" office:value-type="float" office:value="340" calcext:value-type="float">
            <text:p>340</text:p>
          </table:table-cell>
          <table:table-cell table:style-name="ce11" office:value-type="float" office:value="219" calcext:value-type="float">
            <text:p>219</text:p>
          </table:table-cell>
          <table:table-cell table:style-name="ce21" office:value-type="string" calcext:value-type="string">
            <text:p>4-31</text:p>
          </table:table-cell>
          <table:table-cell table:style-name="ce21" office:value-type="float" office:value="31" calcext:value-type="float">
            <text:p>31</text:p>
          </table:table-cell>
          <table:table-cell table:style-name="ce11" office:value-type="string" calcext:value-type="string">
            <text:p>尾形光琳</text:p>
          </table:table-cell>
          <table:table-cell table:style-name="ce11" table:formula="of:=[.E341]" office:value-type="string" office:string-value="尾形光琳" calcext:value-type="string">
            <text:p>尾形光琳</text:p>
          </table:table-cell>
          <table:table-cell table:style-name="ce11" office:value-type="string" calcext:value-type="string">
            <text:p>おがたこうりん</text:p>
          </table:table-cell>
          <table:table-cell table:style-name="ce11" office:value-type="string" calcext:value-type="string">
            <text:p>第４弾ブースターパック</text:p>
          </table:table-cell>
          <table:table-cell table:style-name="ce11" table:formula="of:=VLOOKUP([.H341];[$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41];[$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1];[$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1];[$色番号.$A$1:$色番号.$B$10];2;0)" office:value-type="float" office:value="8" calcext:value-type="float">
            <text:p>8</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1];[$能力語番号.$A$1:$能力語番号.$B$11];2;0);0)" office:value-type="float" office:value="0" calcext:value-type="float">
            <text:p>0</text:p>
          </table:table-cell>
          <table:table-cell office:value-type="string" calcext:value-type="string">
            <text:p>美術</text:p>
          </table:table-cell>
          <table:table-cell table:style-name="ce11" table:formula="of:=IFERROR(VLOOKUP([.$T341];[$特性番号.$A$1:$特性番号.$B$8];2;0);0)" office:value-type="float" office:value="2" calcext:value-type="float">
            <text:p>2</text:p>
          </table:table-cell>
          <table:table-cell table:style-name="ce11"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table:style-name="ce11" office:value-type="float" office:value="4500" calcext:value-type="float">
            <text:p>4500</text:p>
          </table:table-cell>
          <table:table-cell table:style-name="ce25" office:value-type="string" calcext:value-type="string">
            <text:p>1ドローする</text:p>
          </table:table-cell>
          <table:table-cell table:style-name="ce11" table:formula="of:=IFERROR(VLOOKUP([.$X34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1.png</text:p>
          </table:table-cell>
          <table:table-cell table:style-name="ce11" table:formula="of:=CONCATENATE([$JSON.$A$1];[.$C341];[$JSON.$B$1];[.$E341];[$JSON.$C$1];[.F341];[$JSON.$D$1];[.$G341];[$JSON.$E$1];IF(ISNA([.$T341]);&quot;null&quot;;&quot;&quot;&quot;&quot;&amp;[.$T341]&amp;&quot;&quot;&quot;&quot;);[$JSON.$F$1];[.$V341];[$JSON.$G$1];IF(ISNA([.$X341]);&quot;null&quot;;&quot;&quot;&quot;&quot;&amp;[.$X341]&amp;&quot;&quot;&quot;&quot;);[$JSON.$H$1];[.$AA341];[$JSON.$I$1];[.$I341];[$JSON.$J$1];[.K341];[$JSON.$K$1];[.$M341];[$JSON.$L$1];[.$P341];[$JSON.$M$1];[.$O341];[$JSON.$N$1];[.$S341];[$JSON.$O$1];[.$U341];[$JSON.$P$1];IF(ISNA([.$W341]);&quot;null&quot;;[.$W341]);[$JSON.$Q$1];[.$Y341];[$JSON.$R$1];IF([.$Z341];&quot;true&quot;;&quot;false&quot;);[$JSON.$S$1];[.$A341];[$JSON.$T$1];[.$B341];[$JSON.$U$1])" office:value-type="string" office:string-value="{&quot;id&quot;:&quot;4-31&quot;,&quot;name&quot;:&quot;尾形光琳&quot;,&quot;displayName&quot;:&quot;尾形光琳&quot;,&quot;kana&quot;:&quot;おがたこうりん&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rarity&quot;:1,&quot;type&quot;:1,&quot;level&quot;:5,&quot;color&quot;:8,&quot;term&quot;:0,&quot;trait&quot;:2,&quot;power&quot;:4500,&quot;legacy&quot;:4,&quot;anyNumCopies&quot;:false,&quot;orderTable&quot;:340,&quot;orderDeck&quot;:219}," calcext:value-type="string">
            <text:p>{"id":"4-31","name":"尾形光琳","displayName":"尾形光琳","kana":"おがたこうりん","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rarity":1,"type":1,"level":5,"color":8,"term":0,"trait":2,"power":4500,"legacy":4,"anyNumCopies":false,"orderTable":340,"orderDeck":219},</text:p>
          </table:table-cell>
          <table:table-cell table:number-columns-repeated="16356"/>
        </table:table-row>
        <table:table-row table:style-name="ro2">
          <table:table-cell table:style-name="ce11" office:value-type="float" office:value="341" calcext:value-type="float">
            <text:p>341</text:p>
          </table:table-cell>
          <table:table-cell table:style-name="ce11" office:value-type="float" office:value="125" calcext:value-type="float">
            <text:p>125</text:p>
          </table:table-cell>
          <table:table-cell table:style-name="ce21" office:value-type="string" calcext:value-type="string">
            <text:p>4-32</text:p>
          </table:table-cell>
          <table:table-cell table:style-name="ce21" office:value-type="float" office:value="32" calcext:value-type="float">
            <text:p>32</text:p>
          </table:table-cell>
          <table:table-cell table:style-name="ce11" office:value-type="string" calcext:value-type="string">
            <text:p>滝沢馬琴</text:p>
          </table:table-cell>
          <table:table-cell table:style-name="ce11" table:formula="of:=[.E342]" office:value-type="string" office:string-value="滝沢馬琴" calcext:value-type="string">
            <text:p>滝沢馬琴</text:p>
          </table:table-cell>
          <table:table-cell table:style-name="ce11" office:value-type="string" calcext:value-type="string">
            <text:p>たきざわばきん</text:p>
          </table:table-cell>
          <table:table-cell table:style-name="ce11" office:value-type="string" calcext:value-type="string">
            <text:p>第４弾ブースターパック</text:p>
          </table:table-cell>
          <table:table-cell table:style-name="ce11" table:formula="of:=VLOOKUP([.H342];[$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42];[$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2];[$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2];[$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2];[$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342];[$特性番号.$A$1:$特性番号.$B$8];2;0);0)" office:value-type="float" office:value="0" calcext:value-type="float">
            <text:p>0</text:p>
          </table:table-cell>
          <table:table-cell table:style-name="ce11" office:value-type="string" calcext:value-type="string">
            <text:p>執筆 - 黄のハイケイが戦場に置かれるたび、1ドローする。</text:p>
          </table:table-cell>
          <table:table-cell table:style-name="ce11" office:value-type="float" office:value="1500" calcext:value-type="float">
            <text:p>1500</text:p>
          </table:table-cell>
          <table:table-cell table:style-name="ce25" office:value-type="string" calcext:value-type="string">
            <text:p>1ドローする</text:p>
          </table:table-cell>
          <table:table-cell table:style-name="ce11" table:formula="of:=IFERROR(VLOOKUP([.$X342];[$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2.png</text:p>
          </table:table-cell>
          <table:table-cell table:style-name="ce11" table:formula="of:=CONCATENATE([$JSON.$A$1];[.$C342];[$JSON.$B$1];[.$E342];[$JSON.$C$1];[.F342];[$JSON.$D$1];[.$G342];[$JSON.$E$1];IF(ISNA([.$T342]);&quot;null&quot;;&quot;&quot;&quot;&quot;&amp;[.$T342]&amp;&quot;&quot;&quot;&quot;);[$JSON.$F$1];[.$V342];[$JSON.$G$1];IF(ISNA([.$X342]);&quot;null&quot;;&quot;&quot;&quot;&quot;&amp;[.$X342]&amp;&quot;&quot;&quot;&quot;);[$JSON.$H$1];[.$AA342];[$JSON.$I$1];[.$I342];[$JSON.$J$1];[.K342];[$JSON.$K$1];[.$M342];[$JSON.$L$1];[.$P342];[$JSON.$M$1];[.$O342];[$JSON.$N$1];[.$S342];[$JSON.$O$1];[.$U342];[$JSON.$P$1];IF(ISNA([.$W342]);&quot;null&quot;;[.$W342]);[$JSON.$Q$1];[.$Y342];[$JSON.$R$1];IF([.$Z342];&quot;true&quot;;&quot;false&quot;);[$JSON.$S$1];[.$A342];[$JSON.$T$1];[.$B342];[$JSON.$U$1])" office:value-type="string" office:string-value="{&quot;id&quot;:&quot;4-32&quot;,&quot;name&quot;:&quot;滝沢馬琴&quot;,&quot;displayName&quot;:&quot;滝沢馬琴&quot;,&quot;kana&quot;:&quot;たきざわばきん&quot;,&quot;traitText&quot;:null,&quot;ruleText&quot;:&quot;執筆 - 黄のハイケイが戦場に置かれるたび、1ドローする。&quot;,&quot;legacyText&quot;:&quot;1ドローする&quot;,&quot;imageUrl&quot;:&quot;https://one-draw.jp/ijinden/cardlist/004/card/04_032.png&quot;,&quot;expansion&quot;:45,&quot;rarity&quot;:1,&quot;type&quot;:1,&quot;level&quot;:3,&quot;color&quot;:8,&quot;term&quot;:2,&quot;trait&quot;:0,&quot;power&quot;:1500,&quot;legacy&quot;:4,&quot;anyNumCopies&quot;:false,&quot;orderTable&quot;:341,&quot;orderDeck&quot;:125}," calcext:value-type="string">
            <text:p>{"id":"4-32","name":"滝沢馬琴","displayName":"滝沢馬琴","kana":"たきざわばきん","traitText":null,"ruleText":"執筆 - 黄のハイケイが戦場に置かれるたび、1ドローする。","legacyText":"1ドローする","imageUrl":"https://one-draw.jp/ijinden/cardlist/004/card/04_032.png","expansion":45,"rarity":1,"type":1,"level":3,"color":8,"term":2,"trait":0,"power":1500,"legacy":4,"anyNumCopies":false,"orderTable":341,"orderDeck":125},</text:p>
          </table:table-cell>
          <table:table-cell table:number-columns-repeated="16356"/>
        </table:table-row>
        <table:table-row table:style-name="ro2">
          <table:table-cell table:style-name="ce11" office:value-type="float" office:value="342" calcext:value-type="float">
            <text:p>342</text:p>
          </table:table-cell>
          <table:table-cell table:style-name="ce11" office:value-type="float" office:value="251" calcext:value-type="float">
            <text:p>251</text:p>
          </table:table-cell>
          <table:table-cell table:style-name="ce21" office:value-type="string" calcext:value-type="string">
            <text:p>4-33</text:p>
          </table:table-cell>
          <table:table-cell table:style-name="ce21" office:value-type="float" office:value="33" calcext:value-type="float">
            <text:p>33</text:p>
          </table:table-cell>
          <table:table-cell table:style-name="ce11" office:value-type="string" calcext:value-type="string">
            <text:p>メアリー・ゴドウィン・シェリー</text:p>
          </table:table-cell>
          <table:table-cell table:style-name="ce11" table:formula="of:=[.E343]" office:value-type="string" office:string-value="メアリー・ゴドウィン・シェリー" calcext:value-type="string">
            <text:p>メアリー・ゴドウィン・シェリー</text:p>
          </table:table-cell>
          <table:table-cell table:style-name="ce11" office:value-type="string" calcext:value-type="string">
            <text:p>めありーごどうぃんしぇりー</text:p>
          </table:table-cell>
          <table:table-cell table:style-name="ce11" office:value-type="string" calcext:value-type="string">
            <text:p>第４弾ブースターパック</text:p>
          </table:table-cell>
          <table:table-cell table:style-name="ce11" table:formula="of:=VLOOKUP([.H343];[$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43];[$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3];[$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3];[$色番号.$A$1:$色番号.$B$10];2;0)" office:value-type="float" office:value="8" calcext:value-type="float">
            <text:p>8</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43];[$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343];[$特性番号.$A$1:$特性番号.$B$8];2;0);0)" office:value-type="float" office:value="0" calcext:value-type="float">
            <text:p>0</text:p>
          </table:table-cell>
          <table:table-cell table:style-name="ce11"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table:style-name="ce11" office:value-type="float" office:value="5500" calcext:value-type="float">
            <text:p>5500</text:p>
          </table:table-cell>
          <table:table-cell table:style-name="ce25" office:value-type="string" calcext:value-type="string">
            <text:p>木霊</text:p>
          </table:table-cell>
          <table:table-cell table:style-name="ce11" table:formula="of:=IFERROR(VLOOKUP([.$X343];[$遺業能力番号.$A$1:$遺業能力番号.$B$9];2;0);0)" office:value-type="float" office:value="8" calcext:value-type="float">
            <text:p>8</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3.png</text:p>
          </table:table-cell>
          <table:table-cell table:style-name="ce11" table:formula="of:=CONCATENATE([$JSON.$A$1];[.$C343];[$JSON.$B$1];[.$E343];[$JSON.$C$1];[.F343];[$JSON.$D$1];[.$G343];[$JSON.$E$1];IF(ISNA([.$T343]);&quot;null&quot;;&quot;&quot;&quot;&quot;&amp;[.$T343]&amp;&quot;&quot;&quot;&quot;);[$JSON.$F$1];[.$V343];[$JSON.$G$1];IF(ISNA([.$X343]);&quot;null&quot;;&quot;&quot;&quot;&quot;&amp;[.$X343]&amp;&quot;&quot;&quot;&quot;);[$JSON.$H$1];[.$AA343];[$JSON.$I$1];[.$I343];[$JSON.$J$1];[.K343];[$JSON.$K$1];[.$M343];[$JSON.$L$1];[.$P343];[$JSON.$M$1];[.$O343];[$JSON.$N$1];[.$S343];[$JSON.$O$1];[.$U343];[$JSON.$P$1];IF(ISNA([.$W343]);&quot;null&quot;;[.$W343]);[$JSON.$Q$1];[.$Y343];[$JSON.$R$1];IF([.$Z343];&quot;true&quot;;&quot;false&quot;);[$JSON.$S$1];[.$A343];[$JSON.$T$1];[.$B343];[$JSON.$U$1])" office:value-type="string" office:string-value="{&quot;id&quot;:&quot;4-33&quot;,&quot;name&quot;:&quot;メアリー・ゴドウィン・シェリー&quot;,&quot;displayName&quot;:&quot;メアリー・ゴドウィン・シェリー&quot;,&quot;kana&quot;:&quot;めありーごどうぃんしぇり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rarity&quot;:2,&quot;type&quot;:1,&quot;level&quot;:6,&quot;color&quot;:8,&quot;term&quot;:2,&quot;trait&quot;:0,&quot;power&quot;:5500,&quot;legacy&quot;:8,&quot;anyNumCopies&quot;:false,&quot;orderTable&quot;:342,&quot;orderDeck&quot;:251}," calcext:value-type="string">
            <text:p>{"id":"4-33","name":"メアリー・ゴドウィン・シェリー","displayName":"メアリー・ゴドウィン・シェリー","kana":"めありーごどうぃんしぇり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rarity":2,"type":1,"level":6,"color":8,"term":2,"trait":0,"power":5500,"legacy":8,"anyNumCopies":false,"orderTable":342,"orderDeck":251},</text:p>
          </table:table-cell>
          <table:table-cell table:number-columns-repeated="16356"/>
        </table:table-row>
        <table:table-row table:style-name="ro2">
          <table:table-cell table:style-name="ce11" office:value-type="float" office:value="343" calcext:value-type="float">
            <text:p>343</text:p>
          </table:table-cell>
          <table:table-cell table:style-name="ce11" office:value-type="float" office:value="172" calcext:value-type="float">
            <text:p>172</text:p>
          </table:table-cell>
          <table:table-cell table:style-name="ce21" office:value-type="string" calcext:value-type="string">
            <text:p>4-34</text:p>
          </table:table-cell>
          <table:table-cell table:style-name="ce21" office:value-type="float" office:value="34" calcext:value-type="float">
            <text:p>34</text:p>
          </table:table-cell>
          <table:table-cell table:style-name="ce11" office:value-type="string" calcext:value-type="string">
            <text:p>西郷頼母</text:p>
          </table:table-cell>
          <table:table-cell table:style-name="ce11" table:formula="of:=[.E344]" office:value-type="string" office:string-value="西郷頼母" calcext:value-type="string">
            <text:p>西郷頼母</text:p>
          </table:table-cell>
          <table:table-cell table:style-name="ce11" office:value-type="string" calcext:value-type="string">
            <text:p>さいごうたのも</text:p>
          </table:table-cell>
          <table:table-cell table:style-name="ce11" office:value-type="string" calcext:value-type="string">
            <text:p>第４弾ブースターパック</text:p>
          </table:table-cell>
          <table:table-cell table:style-name="ce11" table:formula="of:=VLOOKUP([.H344];[$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44];[$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4];[$種類番号.$A$1:$種類番号.$B$4];2;0)" office:value-type="float" office:value="1" calcext:value-type="float">
            <text:p>1</text:p>
          </table:table-cell>
          <table:table-cell table:style-name="ce11" office:value-type="string" calcext:value-type="string">
            <text:p>黄</text:p>
          </table:table-cell>
          <table:table-cell table:style-name="ce11" table:formula="of:=VLOOKUP([.N344];[$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44];[$特性番号.$A$1:$特性番号.$B$8];2;0);0)" office:value-type="float" office:value="0" calcext:value-type="float">
            <text:p>0</text:p>
          </table:table-cell>
          <table:table-cell table:style-name="ce11" office:value-type="string" calcext:value-type="string">
            <text:p>ウォッチャー¶自分の戦場の他のイジンが破壊されるたびに発動する。このターンに限り「パワー+1000」を得る。</text:p>
          </table:table-cell>
          <table:table-cell table:style-name="ce11" office:value-type="float" office:value="3500" calcext:value-type="float">
            <text:p>3500</text:p>
          </table:table-cell>
          <table:table-cell table:style-name="ce25" office:value-type="string" calcext:value-type="string">
            <text:p>1ドローする</text:p>
          </table:table-cell>
          <table:table-cell table:style-name="ce11" table:formula="of:=IFERROR(VLOOKUP([.$X344];[$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4.png</text:p>
          </table:table-cell>
          <table:table-cell table:style-name="ce11" table:formula="of:=CONCATENATE([$JSON.$A$1];[.$C344];[$JSON.$B$1];[.$E344];[$JSON.$C$1];[.F344];[$JSON.$D$1];[.$G344];[$JSON.$E$1];IF(ISNA([.$T344]);&quot;null&quot;;&quot;&quot;&quot;&quot;&amp;[.$T344]&amp;&quot;&quot;&quot;&quot;);[$JSON.$F$1];[.$V344];[$JSON.$G$1];IF(ISNA([.$X344]);&quot;null&quot;;&quot;&quot;&quot;&quot;&amp;[.$X344]&amp;&quot;&quot;&quot;&quot;);[$JSON.$H$1];[.$AA344];[$JSON.$I$1];[.$I344];[$JSON.$J$1];[.K344];[$JSON.$K$1];[.$M344];[$JSON.$L$1];[.$P344];[$JSON.$M$1];[.$O344];[$JSON.$N$1];[.$S344];[$JSON.$O$1];[.$U344];[$JSON.$P$1];IF(ISNA([.$W344]);&quot;null&quot;;[.$W344]);[$JSON.$Q$1];[.$Y344];[$JSON.$R$1];IF([.$Z344];&quot;true&quot;;&quot;false&quot;);[$JSON.$S$1];[.$A344];[$JSON.$T$1];[.$B344];[$JSON.$U$1])" office:value-type="string" office:string-value="{&quot;id&quot;:&quot;4-34&quot;,&quot;name&quot;:&quot;西郷頼母&quot;,&quot;displayName&quot;:&quot;西郷頼母&quot;,&quot;kana&quot;:&quot;さいごうたのも&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rarity&quot;:1,&quot;type&quot;:1,&quot;level&quot;:4,&quot;color&quot;:8,&quot;term&quot;:0,&quot;trait&quot;:0,&quot;power&quot;:3500,&quot;legacy&quot;:4,&quot;anyNumCopies&quot;:false,&quot;orderTable&quot;:343,&quot;orderDeck&quot;:172}," calcext:value-type="string">
            <text:p>{"id":"4-34","name":"西郷頼母","displayName":"西郷頼母","kana":"さいごうたのも","traitText":null,"ruleText":"ウォッチャー¶自分の戦場の他のイジンが破壊されるたびに発動する。このターンに限り「パワー+1000」を得る。","legacyText":"1ドローする","imageUrl":"https://one-draw.jp/ijinden/cardlist/004/card/04_034.png","expansion":45,"rarity":1,"type":1,"level":4,"color":8,"term":0,"trait":0,"power":3500,"legacy":4,"anyNumCopies":false,"orderTable":343,"orderDeck":172},</text:p>
          </table:table-cell>
          <table:table-cell table:number-columns-repeated="16356"/>
        </table:table-row>
        <table:table-row table:style-name="ro2">
          <table:table-cell table:style-name="ce11" office:value-type="float" office:value="344" calcext:value-type="float">
            <text:p>344</text:p>
          </table:table-cell>
          <table:table-cell table:style-name="ce11" office:value-type="float" office:value="78" calcext:value-type="float">
            <text:p>78</text:p>
          </table:table-cell>
          <table:table-cell table:style-name="ce21" office:value-type="string" calcext:value-type="string">
            <text:p>4-35</text:p>
          </table:table-cell>
          <table:table-cell table:style-name="ce21" office:value-type="float" office:value="35" calcext:value-type="float">
            <text:p>35</text:p>
          </table:table-cell>
          <table:table-cell table:style-name="ce11" office:value-type="string" calcext:value-type="string">
            <text:p>沖田総司</text:p>
          </table:table-cell>
          <table:table-cell table:style-name="ce11" table:formula="of:=[.E345]" office:value-type="string" office:string-value="沖田総司" calcext:value-type="string">
            <text:p>沖田総司</text:p>
          </table:table-cell>
          <table:table-cell table:style-name="ce11" office:value-type="string" calcext:value-type="string">
            <text:p>おきたそうじ</text:p>
          </table:table-cell>
          <table:table-cell table:style-name="ce11" office:value-type="string" calcext:value-type="string">
            <text:p>第４弾ブースターパック</text:p>
          </table:table-cell>
          <table:table-cell table:style-name="ce11" table:formula="of:=VLOOKUP([.H345];[$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45];[$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5];[$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5];[$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5];[$能力語番号.$A$1:$能力語番号.$B$11];2;0);0)" office:value-type="float" office:value="0" calcext:value-type="float">
            <text:p>0</text:p>
          </table:table-cell>
          <table:table-cell office:value-type="string" calcext:value-type="string">
            <text:p>剣術 志願</text:p>
          </table:table-cell>
          <table:table-cell table:style-name="ce11" table:formula="of:=IFERROR(VLOOKUP([.$T345];[$特性番号.$A$1:$特性番号.$B$8];2;0);0)" office:value-type="float" office:value="33" calcext:value-type="float">
            <text:p>33</text:p>
          </table:table-cell>
          <table:table-cell table:style-name="ce11"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table:style-name="ce11" office:value-type="float" office:value="2000" calcext:value-type="float">
            <text:p>2000</text:p>
          </table:table-cell>
          <table:table-cell table:style-name="ce25" office:value-type="string" calcext:value-type="string">
            <text:p>1ドローする</text:p>
          </table:table-cell>
          <table:table-cell table:style-name="ce11" table:formula="of:=IFERROR(VLOOKUP([.$X345];[$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5.png</text:p>
          </table:table-cell>
          <table:table-cell table:style-name="ce11" table:formula="of:=CONCATENATE([$JSON.$A$1];[.$C345];[$JSON.$B$1];[.$E345];[$JSON.$C$1];[.F345];[$JSON.$D$1];[.$G345];[$JSON.$E$1];IF(ISNA([.$T345]);&quot;null&quot;;&quot;&quot;&quot;&quot;&amp;[.$T345]&amp;&quot;&quot;&quot;&quot;);[$JSON.$F$1];[.$V345];[$JSON.$G$1];IF(ISNA([.$X345]);&quot;null&quot;;&quot;&quot;&quot;&quot;&amp;[.$X345]&amp;&quot;&quot;&quot;&quot;);[$JSON.$H$1];[.$AA345];[$JSON.$I$1];[.$I345];[$JSON.$J$1];[.K345];[$JSON.$K$1];[.$M345];[$JSON.$L$1];[.$P345];[$JSON.$M$1];[.$O345];[$JSON.$N$1];[.$S345];[$JSON.$O$1];[.$U345];[$JSON.$P$1];IF(ISNA([.$W345]);&quot;null&quot;;[.$W345]);[$JSON.$Q$1];[.$Y345];[$JSON.$R$1];IF([.$Z345];&quot;true&quot;;&quot;false&quot;);[$JSON.$S$1];[.$A345];[$JSON.$T$1];[.$B345];[$JSON.$U$1])" office:value-type="string" office:string-value="{&quot;id&quot;:&quot;4-35&quot;,&quot;name&quot;:&quot;沖田総司&quot;,&quot;displayName&quot;:&quot;沖田総司&quot;,&quot;kana&quot;:&quot;おきたそうじ&quot;,&quot;traitText&quot;:&quot;剣術 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rarity&quot;:2,&quot;type&quot;:1,&quot;level&quot;:2,&quot;color&quot;:16,&quot;term&quot;:0,&quot;trait&quot;:33,&quot;power&quot;:2000,&quot;legacy&quot;:4,&quot;anyNumCopies&quot;:false,&quot;orderTable&quot;:344,&quot;orderDeck&quot;:78}," calcext:value-type="string">
            <text:p>{"id":"4-35","name":"沖田総司","displayName":"沖田総司","kana":"おきたそうじ","traitText":"剣術 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rarity":2,"type":1,"level":2,"color":16,"term":0,"trait":33,"power":2000,"legacy":4,"anyNumCopies":false,"orderTable":344,"orderDeck":78},</text:p>
          </table:table-cell>
          <table:table-cell table:number-columns-repeated="16356"/>
        </table:table-row>
        <table:table-row table:style-name="ro2">
          <table:table-cell table:style-name="ce11" office:value-type="float" office:value="345" calcext:value-type="float">
            <text:p>345</text:p>
          </table:table-cell>
          <table:table-cell table:style-name="ce11" office:value-type="float" office:value="28" calcext:value-type="float">
            <text:p>28</text:p>
          </table:table-cell>
          <table:table-cell table:style-name="ce21" office:value-type="string" calcext:value-type="string">
            <text:p>4-36</text:p>
          </table:table-cell>
          <table:table-cell table:style-name="ce21" office:value-type="float" office:value="36" calcext:value-type="float">
            <text:p>36</text:p>
          </table:table-cell>
          <table:table-cell table:style-name="ce11" office:value-type="string" calcext:value-type="string">
            <text:p>ジョバンニ＝ディ＝メディチ</text:p>
          </table:table-cell>
          <table:table-cell table:style-name="ce11" table:formula="of:=[.E346]" office:value-type="string" office:string-value="ジョバンニ＝ディ＝メディチ" calcext:value-type="string">
            <text:p>ジョバンニ＝ディ＝メディチ</text:p>
          </table:table-cell>
          <table:table-cell table:style-name="ce11" office:value-type="string" calcext:value-type="string">
            <text:p>じょばんにでぃめでぃち</text:p>
          </table:table-cell>
          <table:table-cell table:style-name="ce11" office:value-type="string" calcext:value-type="string">
            <text:p>第４弾ブースターパック</text:p>
          </table:table-cell>
          <table:table-cell table:style-name="ce11" table:formula="of:=VLOOKUP([.H346];[$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46];[$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6];[$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6];[$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46];[$特性番号.$A$1:$特性番号.$B$8];2;0);0)" office:value-type="float" office:value="0" calcext:value-type="float">
            <text:p>0</text:p>
          </table:table-cell>
          <table:table-cell table:style-name="ce11"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346];[$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6.png</text:p>
          </table:table-cell>
          <table:table-cell table:style-name="ce11" table:formula="of:=CONCATENATE([$JSON.$A$1];[.$C346];[$JSON.$B$1];[.$E346];[$JSON.$C$1];[.F346];[$JSON.$D$1];[.$G346];[$JSON.$E$1];IF(ISNA([.$T346]);&quot;null&quot;;&quot;&quot;&quot;&quot;&amp;[.$T346]&amp;&quot;&quot;&quot;&quot;);[$JSON.$F$1];[.$V346];[$JSON.$G$1];IF(ISNA([.$X346]);&quot;null&quot;;&quot;&quot;&quot;&quot;&amp;[.$X346]&amp;&quot;&quot;&quot;&quot;);[$JSON.$H$1];[.$AA346];[$JSON.$I$1];[.$I346];[$JSON.$J$1];[.K346];[$JSON.$K$1];[.$M346];[$JSON.$L$1];[.$P346];[$JSON.$M$1];[.$O346];[$JSON.$N$1];[.$S346];[$JSON.$O$1];[.$U346];[$JSON.$P$1];IF(ISNA([.$W346]);&quot;null&quot;;[.$W346]);[$JSON.$Q$1];[.$Y346];[$JSON.$R$1];IF([.$Z346];&quot;true&quot;;&quot;false&quot;);[$JSON.$S$1];[.$A346];[$JSON.$T$1];[.$B346];[$JSON.$U$1])" office:value-type="string" office:string-value="{&quot;id&quot;:&quot;4-36&quot;,&quot;name&quot;:&quot;ジョバンニ＝ディ＝メディチ&quot;,&quot;displayName&quot;:&quot;ジョバンニ＝ディ＝メディチ&quot;,&quot;kana&quot;:&quot;じょばんにでぃめでぃち&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rarity&quot;:1,&quot;type&quot;:1,&quot;level&quot;:1,&quot;color&quot;:16,&quot;term&quot;:0,&quot;trait&quot;:0,&quot;power&quot;:1000,&quot;legacy&quot;:0,&quot;anyNumCopies&quot;:false,&quot;orderTable&quot;:345,&quot;orderDeck&quot;:28}," calcext:value-type="string">
            <text:p>{"id":"4-36","name":"ジョバンニ＝ディ＝メディチ","displayName":"ジョバンニ＝ディ＝メディチ","kana":"じょばんにでぃめでぃち","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rarity":1,"type":1,"level":1,"color":16,"term":0,"trait":0,"power":1000,"legacy":0,"anyNumCopies":false,"orderTable":345,"orderDeck":28},</text:p>
          </table:table-cell>
          <table:table-cell table:number-columns-repeated="16356"/>
        </table:table-row>
        <table:table-row table:style-name="ro2">
          <table:table-cell table:style-name="ce11" office:value-type="float" office:value="346" calcext:value-type="float">
            <text:p>346</text:p>
          </table:table-cell>
          <table:table-cell table:style-name="ce11" office:value-type="float" office:value="79" calcext:value-type="float">
            <text:p>79</text:p>
          </table:table-cell>
          <table:table-cell table:style-name="ce21" office:value-type="string" calcext:value-type="string">
            <text:p>4-37</text:p>
          </table:table-cell>
          <table:table-cell table:style-name="ce21" office:value-type="float" office:value="37" calcext:value-type="float">
            <text:p>37</text:p>
          </table:table-cell>
          <table:table-cell table:style-name="ce11" office:value-type="string" calcext:value-type="string">
            <text:p>フローレンス・ナイチンゲール</text:p>
          </table:table-cell>
          <table:table-cell table:style-name="ce11" table:formula="of:=[.E347]" office:value-type="string" office:string-value="フローレンス・ナイチンゲール" calcext:value-type="string">
            <text:p>フローレンス・ナイチンゲール</text:p>
          </table:table-cell>
          <table:table-cell table:style-name="ce11" office:value-type="string" calcext:value-type="string">
            <text:p>ふろーれんすないちんげーる</text:p>
          </table:table-cell>
          <table:table-cell table:style-name="ce11" office:value-type="string" calcext:value-type="string">
            <text:p>第４弾ブースターパック</text:p>
          </table:table-cell>
          <table:table-cell table:style-name="ce11" table:formula="of:=VLOOKUP([.H347];[$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47];[$レアリティ番号.$A$1:$レアリティ番号.$B$4];2;0)" office:value-type="float" office:value="2" calcext:value-type="float">
            <text:p>2</text:p>
          </table:table-cell>
          <table:table-cell table:style-name="ce11" office:value-type="string" calcext:value-type="string">
            <text:p>イジン</text:p>
          </table:table-cell>
          <table:table-cell table:style-name="ce11" table:formula="of:=VLOOKUP([.L347];[$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7];[$色番号.$A$1:$色番号.$B$10];2;0)" office:value-type="float" office:value="16" calcext:value-type="float">
            <text:p>16</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7];[$能力語番号.$A$1:$能力語番号.$B$11];2;0);0)" office:value-type="float" office:value="0" calcext:value-type="float">
            <text:p>0</text:p>
          </table:table-cell>
          <table:table-cell office:value-type="string" calcext:value-type="string">
            <text:p>医術</text:p>
          </table:table-cell>
          <table:table-cell table:style-name="ce11" table:formula="of:=IFERROR(VLOOKUP([.$T347];[$特性番号.$A$1:$特性番号.$B$8];2;0);0)" office:value-type="float" office:value="16" calcext:value-type="float">
            <text:p>16</text:p>
          </table:table-cell>
          <table:table-cell table:style-name="ce11" office:value-type="string" calcext:value-type="string">
            <text:p>墓地から戦場に置かれたとき、自分の山札の上から1枚を裏のまま戦場に置く。</text:p>
          </table:table-cell>
          <table:table-cell table:style-name="ce11" office:value-type="float" office:value="0" calcext:value-type="float">
            <text:p>0</text:p>
          </table:table-cell>
          <table:table-cell table:style-name="ce25" office:value-type="string" calcext:value-type="string">
            <text:p>反魂</text:p>
          </table:table-cell>
          <table:table-cell table:style-name="ce11" table:formula="of:=IFERROR(VLOOKUP([.$X347];[$遺業能力番号.$A$1:$遺業能力番号.$B$9];2;0);0)" office:value-type="float" office:value="6" calcext:value-type="float">
            <text:p>6</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7.png</text:p>
          </table:table-cell>
          <table:table-cell table:style-name="ce11" table:formula="of:=CONCATENATE([$JSON.$A$1];[.$C347];[$JSON.$B$1];[.$E347];[$JSON.$C$1];[.F347];[$JSON.$D$1];[.$G347];[$JSON.$E$1];IF(ISNA([.$T347]);&quot;null&quot;;&quot;&quot;&quot;&quot;&amp;[.$T347]&amp;&quot;&quot;&quot;&quot;);[$JSON.$F$1];[.$V347];[$JSON.$G$1];IF(ISNA([.$X347]);&quot;null&quot;;&quot;&quot;&quot;&quot;&amp;[.$X347]&amp;&quot;&quot;&quot;&quot;);[$JSON.$H$1];[.$AA347];[$JSON.$I$1];[.$I347];[$JSON.$J$1];[.K347];[$JSON.$K$1];[.$M347];[$JSON.$L$1];[.$P347];[$JSON.$M$1];[.$O347];[$JSON.$N$1];[.$S347];[$JSON.$O$1];[.$U347];[$JSON.$P$1];IF(ISNA([.$W347]);&quot;null&quot;;[.$W347]);[$JSON.$Q$1];[.$Y347];[$JSON.$R$1];IF([.$Z347];&quot;true&quot;;&quot;false&quot;);[$JSON.$S$1];[.$A347];[$JSON.$T$1];[.$B347];[$JSON.$U$1])" office:value-type="string" office:string-value="{&quot;id&quot;:&quot;4-37&quot;,&quot;name&quot;:&quot;フローレンス・ナイチンゲール&quot;,&quot;displayName&quot;:&quot;フローレンス・ナイチンゲール&quot;,&quot;kana&quot;:&quot;ふろーれんすないちんげーる&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rarity&quot;:2,&quot;type&quot;:1,&quot;level&quot;:2,&quot;color&quot;:16,&quot;term&quot;:0,&quot;trait&quot;:16,&quot;power&quot;:0,&quot;legacy&quot;:6,&quot;anyNumCopies&quot;:false,&quot;orderTable&quot;:346,&quot;orderDeck&quot;:79}," calcext:value-type="string">
            <text:p>{"id":"4-37","name":"フローレンス・ナイチンゲール","displayName":"フローレンス・ナイチンゲール","kana":"ふろーれんすないちんげーる","traitText":"医術","ruleText":"墓地から戦場に置かれたとき、自分の山札の上から1枚を裏のまま戦場に置く。","legacyText":"反魂","imageUrl":"https://one-draw.jp/ijinden/cardlist/004/card/04_037.png","expansion":45,"rarity":2,"type":1,"level":2,"color":16,"term":0,"trait":16,"power":0,"legacy":6,"anyNumCopies":false,"orderTable":346,"orderDeck":79},</text:p>
          </table:table-cell>
          <table:table-cell table:number-columns-repeated="16356"/>
        </table:table-row>
        <table:table-row table:style-name="ro2">
          <table:table-cell table:style-name="ce11" office:value-type="float" office:value="347" calcext:value-type="float">
            <text:p>347</text:p>
          </table:table-cell>
          <table:table-cell table:style-name="ce11" office:value-type="float" office:value="223" calcext:value-type="float">
            <text:p>223</text:p>
          </table:table-cell>
          <table:table-cell table:style-name="ce21" office:value-type="string" calcext:value-type="string">
            <text:p>4-38</text:p>
          </table:table-cell>
          <table:table-cell table:style-name="ce21" office:value-type="float" office:value="38" calcext:value-type="float">
            <text:p>38</text:p>
          </table:table-cell>
          <table:table-cell table:style-name="ce11" office:value-type="string" calcext:value-type="string">
            <text:p>ミシェル・ノストラダムス</text:p>
          </table:table-cell>
          <table:table-cell table:style-name="ce11" table:formula="of:=[.E348]" office:value-type="string" office:string-value="ミシェル・ノストラダムス" calcext:value-type="string">
            <text:p>ミシェル・ノストラダムス</text:p>
          </table:table-cell>
          <table:table-cell table:style-name="ce11" office:value-type="string" calcext:value-type="string">
            <text:p>みしぇるのすとらだむす</text:p>
          </table:table-cell>
          <table:table-cell table:style-name="ce11" office:value-type="string" calcext:value-type="string">
            <text:p>第４弾ブースターパック</text:p>
          </table:table-cell>
          <table:table-cell table:style-name="ce11" table:formula="of:=VLOOKUP([.H348];[$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48];[$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8];[$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8];[$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8];[$能力語番号.$A$1:$能力語番号.$B$11];2;0);0)" office:value-type="float" office:value="0" calcext:value-type="float">
            <text:p>0</text:p>
          </table:table-cell>
          <table:table-cell office:value-type="string" calcext:value-type="string">
            <text:p>医術</text:p>
          </table:table-cell>
          <table:table-cell table:style-name="ce11" table:formula="of:=IFERROR(VLOOKUP([.$T348];[$特性番号.$A$1:$特性番号.$B$8];2;0);0)" office:value-type="float" office:value="16" calcext:value-type="float">
            <text:p>16</text:p>
          </table:table-cell>
          <table:table-cell table:style-name="ce11"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table:style-name="ce11" office:value-type="float" office:value="5000" calcext:value-type="float">
            <text:p>5000</text:p>
          </table:table-cell>
          <table:table-cell table:style-name="ce25" office:value-type="string" calcext:value-type="string">
            <text:p>1ドローする</text:p>
          </table:table-cell>
          <table:table-cell table:style-name="ce11" table:formula="of:=IFERROR(VLOOKUP([.$X348];[$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8.png</text:p>
          </table:table-cell>
          <table:table-cell table:style-name="ce11" table:formula="of:=CONCATENATE([$JSON.$A$1];[.$C348];[$JSON.$B$1];[.$E348];[$JSON.$C$1];[.F348];[$JSON.$D$1];[.$G348];[$JSON.$E$1];IF(ISNA([.$T348]);&quot;null&quot;;&quot;&quot;&quot;&quot;&amp;[.$T348]&amp;&quot;&quot;&quot;&quot;);[$JSON.$F$1];[.$V348];[$JSON.$G$1];IF(ISNA([.$X348]);&quot;null&quot;;&quot;&quot;&quot;&quot;&amp;[.$X348]&amp;&quot;&quot;&quot;&quot;);[$JSON.$H$1];[.$AA348];[$JSON.$I$1];[.$I348];[$JSON.$J$1];[.K348];[$JSON.$K$1];[.$M348];[$JSON.$L$1];[.$P348];[$JSON.$M$1];[.$O348];[$JSON.$N$1];[.$S348];[$JSON.$O$1];[.$U348];[$JSON.$P$1];IF(ISNA([.$W348]);&quot;null&quot;;[.$W348]);[$JSON.$Q$1];[.$Y348];[$JSON.$R$1];IF([.$Z348];&quot;true&quot;;&quot;false&quot;);[$JSON.$S$1];[.$A348];[$JSON.$T$1];[.$B348];[$JSON.$U$1])" office:value-type="string" office:string-value="{&quot;id&quot;:&quot;4-38&quot;,&quot;name&quot;:&quot;ミシェル・ノストラダムス&quot;,&quot;displayName&quot;:&quot;ミシェル・ノストラダムス&quot;,&quot;kana&quot;:&quot;みしぇるのすとらだむす&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rarity&quot;:1,&quot;type&quot;:1,&quot;level&quot;:5,&quot;color&quot;:16,&quot;term&quot;:0,&quot;trait&quot;:16,&quot;power&quot;:5000,&quot;legacy&quot;:4,&quot;anyNumCopies&quot;:false,&quot;orderTable&quot;:347,&quot;orderDeck&quot;:223}," calcext:value-type="string">
            <text:p>{"id":"4-38","name":"ミシェル・ノストラダムス","displayName":"ミシェル・ノストラダムス","kana":"みしぇるのすとらだむす","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rarity":1,"type":1,"level":5,"color":16,"term":0,"trait":16,"power":5000,"legacy":4,"anyNumCopies":false,"orderTable":347,"orderDeck":223},</text:p>
          </table:table-cell>
          <table:table-cell table:number-columns-repeated="16356"/>
        </table:table-row>
        <table:table-row table:style-name="ro2">
          <table:table-cell table:style-name="ce11" office:value-type="float" office:value="348" calcext:value-type="float">
            <text:p>348</text:p>
          </table:table-cell>
          <table:table-cell table:style-name="ce11" office:value-type="float" office:value="133" calcext:value-type="float">
            <text:p>133</text:p>
          </table:table-cell>
          <table:table-cell table:style-name="ce21" office:value-type="string" calcext:value-type="string">
            <text:p>4-39</text:p>
          </table:table-cell>
          <table:table-cell table:style-name="ce21" office:value-type="float" office:value="39" calcext:value-type="float">
            <text:p>39</text:p>
          </table:table-cell>
          <table:table-cell table:style-name="ce11" office:value-type="string" calcext:value-type="string">
            <text:p>ヴィルヘルム・コンラート・レントゲン</text:p>
          </table:table-cell>
          <table:table-cell table:style-name="ce11" table:formula="of:=[.E349]" office:value-type="string" office:string-value="ヴィルヘルム・コンラート・レントゲン" calcext:value-type="string">
            <text:p>ヴィルヘルム・コンラート・レントゲン</text:p>
          </table:table-cell>
          <table:table-cell table:style-name="ce11" office:value-type="string" calcext:value-type="string">
            <text:p>ゔぃるへるむこんらーとれんとげん</text:p>
          </table:table-cell>
          <table:table-cell table:style-name="ce11" office:value-type="string" calcext:value-type="string">
            <text:p>第４弾ブースターパック</text:p>
          </table:table-cell>
          <table:table-cell table:style-name="ce11" table:formula="of:=VLOOKUP([.H349];[$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49];[$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49];[$種類番号.$A$1:$種類番号.$B$4];2;0)" office:value-type="float" office:value="1" calcext:value-type="float">
            <text:p>1</text:p>
          </table:table-cell>
          <table:table-cell table:style-name="ce11" office:value-type="string" calcext:value-type="string">
            <text:p>紫</text:p>
          </table:table-cell>
          <table:table-cell table:style-name="ce11" table:formula="of:=VLOOKUP([.N349];[$色番号.$A$1:$色番号.$B$10];2;0)" office:value-type="float" office:value="16" calcext:value-type="float">
            <text:p>16</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4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49];[$特性番号.$A$1:$特性番号.$B$8];2;0);0)" office:value-type="float" office:value="0" calcext:value-type="float">
            <text:p>0</text:p>
          </table:table-cell>
          <table:table-cell table:style-name="ce11"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table:style-name="ce11"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34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39.png</text:p>
          </table:table-cell>
          <table:table-cell table:style-name="ce11" table:formula="of:=CONCATENATE([$JSON.$A$1];[.$C349];[$JSON.$B$1];[.$E349];[$JSON.$C$1];[.F349];[$JSON.$D$1];[.$G349];[$JSON.$E$1];IF(ISNA([.$T349]);&quot;null&quot;;&quot;&quot;&quot;&quot;&amp;[.$T349]&amp;&quot;&quot;&quot;&quot;);[$JSON.$F$1];[.$V349];[$JSON.$G$1];IF(ISNA([.$X349]);&quot;null&quot;;&quot;&quot;&quot;&quot;&amp;[.$X349]&amp;&quot;&quot;&quot;&quot;);[$JSON.$H$1];[.$AA349];[$JSON.$I$1];[.$I349];[$JSON.$J$1];[.K349];[$JSON.$K$1];[.$M349];[$JSON.$L$1];[.$P349];[$JSON.$M$1];[.$O349];[$JSON.$N$1];[.$S349];[$JSON.$O$1];[.$U349];[$JSON.$P$1];IF(ISNA([.$W349]);&quot;null&quot;;[.$W349]);[$JSON.$Q$1];[.$Y349];[$JSON.$R$1];IF([.$Z349];&quot;true&quot;;&quot;false&quot;);[$JSON.$S$1];[.$A349];[$JSON.$T$1];[.$B349];[$JSON.$U$1])" office:value-type="string" office:string-value="{&quot;id&quot;:&quot;4-39&quot;,&quot;name&quot;:&quot;ヴィルヘルム・コンラート・レントゲン&quot;,&quot;displayName&quot;:&quot;ヴィルヘルム・コンラート・レントゲン&quot;,&quot;kana&quot;:&quot;ゔぃるへるむこんらーとれんとげん&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rarity&quot;:1,&quot;type&quot;:1,&quot;level&quot;:3,&quot;color&quot;:16,&quot;term&quot;:0,&quot;trait&quot;:0,&quot;power&quot;:1000,&quot;legacy&quot;:0,&quot;anyNumCopies&quot;:false,&quot;orderTable&quot;:348,&quot;orderDeck&quot;:133}," calcext:value-type="string">
            <text:p>{"id":"4-39","name":"ヴィルヘルム・コンラート・レントゲン","displayName":"ヴィルヘルム・コンラート・レントゲン","kana":"ゔぃるへるむこんらーとれんとげん","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rarity":1,"type":1,"level":3,"color":16,"term":0,"trait":0,"power":1000,"legacy":0,"anyNumCopies":false,"orderTable":348,"orderDeck":133},</text:p>
          </table:table-cell>
          <table:table-cell table:number-columns-repeated="16356"/>
        </table:table-row>
        <table:table-row table:style-name="ro2">
          <table:table-cell table:style-name="ce11" office:value-type="float" office:value="349" calcext:value-type="float">
            <text:p>349</text:p>
          </table:table-cell>
          <table:table-cell table:style-name="ce11" office:value-type="float" office:value="256" calcext:value-type="float">
            <text:p>256</text:p>
          </table:table-cell>
          <table:table-cell table:style-name="ce21" office:value-type="string" calcext:value-type="string">
            <text:p>4-40</text:p>
          </table:table-cell>
          <table:table-cell table:style-name="ce21" office:value-type="float" office:value="40" calcext:value-type="float">
            <text:p>40</text:p>
          </table:table-cell>
          <table:table-cell table:style-name="ce11" office:value-type="string" calcext:value-type="string">
            <text:p>榎本武揚</text:p>
          </table:table-cell>
          <table:table-cell table:style-name="ce11" table:formula="of:=[.E350]" office:value-type="string" office:string-value="榎本武揚" calcext:value-type="string">
            <text:p>榎本武揚</text:p>
          </table:table-cell>
          <table:table-cell table:style-name="ce11" office:value-type="string" calcext:value-type="string">
            <text:p>えのもとたけあき</text:p>
          </table:table-cell>
          <table:table-cell table:style-name="ce11" office:value-type="string" calcext:value-type="string">
            <text:p>第４弾ブースターパック</text:p>
          </table:table-cell>
          <table:table-cell table:style-name="ce11" table:formula="of:=VLOOKUP([.H350];[$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50];[$レアリティ番号.$A$1:$レアリティ番号.$B$4];2;0)" office:value-type="float" office:value="1" calcext:value-type="float">
            <text:p>1</text:p>
          </table:table-cell>
          <table:table-cell table:style-name="ce11" office:value-type="string" calcext:value-type="string">
            <text:p>イジン</text:p>
          </table:table-cell>
          <table:table-cell table:style-name="ce11" table:formula="of:=VLOOKUP([.L350];[$種類番号.$A$1:$種類番号.$B$4];2;0)" office:value-type="float" office:value="1" calcext:value-type="float">
            <text:p>1</text:p>
          </table:table-cell>
          <table:table-cell table:style-name="ce11" office:value-type="string" calcext:value-type="string">
            <text:p>紫</text:p>
          </table:table-cell>
          <table:table-cell table:style-name="ce11" table:formula="of:=VLOOKUP([.N350];[$色番号.$A$1:$色番号.$B$10];2;0)" office:value-type="float" office:value="16" calcext:value-type="float">
            <text:p>16</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航海</text:p>
          </table:table-cell>
          <table:table-cell table:style-name="ce11" table:formula="of:=IFERROR(VLOOKUP([.$R350];[$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350];[$特性番号.$A$1:$特性番号.$B$8];2;0);0)" office:value-type="float" office:value="0" calcext:value-type="float">
            <text:p>0</text:p>
          </table:table-cell>
          <table:table-cell table:style-name="ce11"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5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0.png</text:p>
          </table:table-cell>
          <table:table-cell table:style-name="ce11" table:formula="of:=CONCATENATE([$JSON.$A$1];[.$C350];[$JSON.$B$1];[.$E350];[$JSON.$C$1];[.F350];[$JSON.$D$1];[.$G350];[$JSON.$E$1];IF(ISNA([.$T350]);&quot;null&quot;;&quot;&quot;&quot;&quot;&amp;[.$T350]&amp;&quot;&quot;&quot;&quot;);[$JSON.$F$1];[.$V350];[$JSON.$G$1];IF(ISNA([.$X350]);&quot;null&quot;;&quot;&quot;&quot;&quot;&amp;[.$X350]&amp;&quot;&quot;&quot;&quot;);[$JSON.$H$1];[.$AA350];[$JSON.$I$1];[.$I350];[$JSON.$J$1];[.K350];[$JSON.$K$1];[.$M350];[$JSON.$L$1];[.$P350];[$JSON.$M$1];[.$O350];[$JSON.$N$1];[.$S350];[$JSON.$O$1];[.$U350];[$JSON.$P$1];IF(ISNA([.$W350]);&quot;null&quot;;[.$W350]);[$JSON.$Q$1];[.$Y350];[$JSON.$R$1];IF([.$Z350];&quot;true&quot;;&quot;false&quot;);[$JSON.$S$1];[.$A350];[$JSON.$T$1];[.$B350];[$JSON.$U$1])" office:value-type="string" office:string-value="{&quot;id&quot;:&quot;4-40&quot;,&quot;name&quot;:&quot;榎本武揚&quot;,&quot;displayName&quot;:&quot;榎本武揚&quot;,&quot;kana&quot;:&quot;えのもとたけあき&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rarity&quot;:1,&quot;type&quot;:1,&quot;level&quot;:6,&quot;color&quot;:16,&quot;term&quot;:1,&quot;trait&quot;:0,&quot;power&quot;:5000,&quot;legacy&quot;:0,&quot;anyNumCopies&quot;:false,&quot;orderTable&quot;:349,&quot;orderDeck&quot;:256}," calcext:value-type="string">
            <text:p>{"id":"4-40","name":"榎本武揚","displayName":"榎本武揚","kana":"えのもとたけあき","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rarity":1,"type":1,"level":6,"color":16,"term":1,"trait":0,"power":5000,"legacy":0,"anyNumCopies":false,"orderTable":349,"orderDeck":256},</text:p>
          </table:table-cell>
          <table:table-cell table:number-columns-repeated="16356"/>
        </table:table-row>
        <table:table-row table:style-name="ro2">
          <table:table-cell table:style-name="ce11" office:value-type="float" office:value="350" calcext:value-type="float">
            <text:p>350</text:p>
          </table:table-cell>
          <table:table-cell table:style-name="ce11" office:value-type="float" office:value="318" calcext:value-type="float">
            <text:p>318</text:p>
          </table:table-cell>
          <table:table-cell table:style-name="ce21" office:value-type="string" calcext:value-type="string">
            <text:p>4-41</text:p>
          </table:table-cell>
          <table:table-cell table:style-name="ce21" office:value-type="float" office:value="41" calcext:value-type="float">
            <text:p>41</text:p>
          </table:table-cell>
          <table:table-cell table:style-name="ce11" office:value-type="string" calcext:value-type="string">
            <text:p>無礼打</text:p>
          </table:table-cell>
          <table:table-cell table:style-name="ce11" table:formula="of:=[.E351]" office:value-type="string" office:string-value="無礼打" calcext:value-type="string">
            <text:p>無礼打</text:p>
          </table:table-cell>
          <table:table-cell table:style-name="ce11" office:value-type="string" calcext:value-type="string">
            <text:p>ぶれいうち</text:p>
          </table:table-cell>
          <table:table-cell table:style-name="ce11" office:value-type="string" calcext:value-type="string">
            <text:p>第４弾ブースターパック</text:p>
          </table:table-cell>
          <table:table-cell table:style-name="ce11" table:formula="of:=VLOOKUP([.H351];[$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51];[$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1];[$種類番号.$A$1:$種類番号.$B$4];2;0)" office:value-type="float" office:value="2" calcext:value-type="float">
            <text:p>2</text:p>
          </table:table-cell>
          <table:table-cell table:style-name="ce11" office:value-type="string" calcext:value-type="string">
            <text:p>赤</text:p>
          </table:table-cell>
          <table:table-cell table:style-name="ce11" table:formula="of:=VLOOKUP([.N351];[$色番号.$A$1:$色番号.$B$10];2;0)" office:value-type="float" office:value="1" calcext:value-type="float">
            <text:p>1</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51];[$特性番号.$A$1:$特性番号.$B$8];2;0);0)" office:value-type="float" office:value="0" calcext:value-type="float">
            <text:p>0</text:p>
          </table:table-cell>
          <table:table-cell table:style-name="ce11" office:value-type="string" calcext:value-type="string">
            <text:p>レベル2以下の赤でないイジンが戦場に置かれたときに発動できる。そのイジンを破壊して、これを墓地に置く。</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51];[$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1.png</text:p>
          </table:table-cell>
          <table:table-cell table:style-name="ce11" table:formula="of:=CONCATENATE([$JSON.$A$1];[.$C351];[$JSON.$B$1];[.$E351];[$JSON.$C$1];[.F351];[$JSON.$D$1];[.$G351];[$JSON.$E$1];IF(ISNA([.$T351]);&quot;null&quot;;&quot;&quot;&quot;&quot;&amp;[.$T351]&amp;&quot;&quot;&quot;&quot;);[$JSON.$F$1];[.$V351];[$JSON.$G$1];IF(ISNA([.$X351]);&quot;null&quot;;&quot;&quot;&quot;&quot;&amp;[.$X351]&amp;&quot;&quot;&quot;&quot;);[$JSON.$H$1];[.$AA351];[$JSON.$I$1];[.$I351];[$JSON.$J$1];[.K351];[$JSON.$K$1];[.$M351];[$JSON.$L$1];[.$P351];[$JSON.$M$1];[.$O351];[$JSON.$N$1];[.$S351];[$JSON.$O$1];[.$U351];[$JSON.$P$1];IF(ISNA([.$W351]);&quot;null&quot;;[.$W351]);[$JSON.$Q$1];[.$Y351];[$JSON.$R$1];IF([.$Z351];&quot;true&quot;;&quot;false&quot;);[$JSON.$S$1];[.$A351];[$JSON.$T$1];[.$B351];[$JSON.$U$1])" office:value-type="string" office:string-value="{&quot;id&quot;:&quot;4-41&quot;,&quot;name&quot;:&quot;無礼打&quot;,&quot;displayName&quot;:&quot;無礼打&quot;,&quot;kana&quot;:&quot;ぶれいうち&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rarity&quot;:1,&quot;type&quot;:2,&quot;level&quot;:3,&quot;color&quot;:1,&quot;term&quot;:0,&quot;trait&quot;:0,&quot;power&quot;:null,&quot;legacy&quot;:4,&quot;anyNumCopies&quot;:false,&quot;orderTable&quot;:350,&quot;orderDeck&quot;:318}," calcext:value-type="string">
            <text:p>{"id":"4-41","name":"無礼打","displayName":"無礼打","kana":"ぶれいうち","traitText":null,"ruleText":"レベル2以下の赤でないイジンが戦場に置かれたときに発動できる。そのイジンを破壊して、これを墓地に置く。","legacyText":"1ドローする","imageUrl":"https://one-draw.jp/ijinden/cardlist/004/card/04_041.png","expansion":45,"rarity":1,"type":2,"level":3,"color":1,"term":0,"trait":0,"power":null,"legacy":4,"anyNumCopies":false,"orderTable":350,"orderDeck":318},</text:p>
          </table:table-cell>
          <table:table-cell table:number-columns-repeated="16356"/>
        </table:table-row>
        <table:table-row table:style-name="ro2">
          <table:table-cell table:style-name="ce11" office:value-type="float" office:value="351" calcext:value-type="float">
            <text:p>351</text:p>
          </table:table-cell>
          <table:table-cell table:style-name="ce11" office:value-type="float" office:value="305" calcext:value-type="float">
            <text:p>305</text:p>
          </table:table-cell>
          <table:table-cell table:style-name="ce21" office:value-type="string" calcext:value-type="string">
            <text:p>4-42</text:p>
          </table:table-cell>
          <table:table-cell table:style-name="ce21" office:value-type="float" office:value="42" calcext:value-type="float">
            <text:p>42</text:p>
          </table:table-cell>
          <table:table-cell table:style-name="ce11" office:value-type="string" calcext:value-type="string">
            <text:p>紡績工場</text:p>
          </table:table-cell>
          <table:table-cell table:style-name="ce11" table:formula="of:=[.E352]" office:value-type="string" office:string-value="紡績工場" calcext:value-type="string">
            <text:p>紡績工場</text:p>
          </table:table-cell>
          <table:table-cell table:style-name="ce11" office:value-type="string" calcext:value-type="string">
            <text:p>ぼうせきこうじょう</text:p>
          </table:table-cell>
          <table:table-cell table:style-name="ce11" office:value-type="string" calcext:value-type="string">
            <text:p>第４弾ブースターパック</text:p>
          </table:table-cell>
          <table:table-cell table:style-name="ce11" table:formula="of:=VLOOKUP([.H352];[$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52];[$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2];[$種類番号.$A$1:$種類番号.$B$4];2;0)" office:value-type="float" office:value="2" calcext:value-type="float">
            <text:p>2</text:p>
          </table:table-cell>
          <table:table-cell table:style-name="ce11" office:value-type="string" calcext:value-type="string">
            <text:p>赤</text:p>
          </table:table-cell>
          <table:table-cell table:style-name="ce11" table:formula="of:=VLOOKUP([.N352];[$色番号.$A$1:$色番号.$B$10];2;0)" office:value-type="float" office:value="1" calcext:value-type="float">
            <text:p>1</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52];[$特性番号.$A$1:$特性番号.$B$8];2;0);0)" office:value-type="float" office:value="0" calcext:value-type="float">
            <text:p>0</text:p>
          </table:table-cell>
          <table:table-cell table:style-name="ce11"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2];[$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2.png</text:p>
          </table:table-cell>
          <table:table-cell table:style-name="ce11" table:formula="of:=CONCATENATE([$JSON.$A$1];[.$C352];[$JSON.$B$1];[.$E352];[$JSON.$C$1];[.F352];[$JSON.$D$1];[.$G352];[$JSON.$E$1];IF(ISNA([.$T352]);&quot;null&quot;;&quot;&quot;&quot;&quot;&amp;[.$T352]&amp;&quot;&quot;&quot;&quot;);[$JSON.$F$1];[.$V352];[$JSON.$G$1];IF(ISNA([.$X352]);&quot;null&quot;;&quot;&quot;&quot;&quot;&amp;[.$X352]&amp;&quot;&quot;&quot;&quot;);[$JSON.$H$1];[.$AA352];[$JSON.$I$1];[.$I352];[$JSON.$J$1];[.K352];[$JSON.$K$1];[.$M352];[$JSON.$L$1];[.$P352];[$JSON.$M$1];[.$O352];[$JSON.$N$1];[.$S352];[$JSON.$O$1];[.$U352];[$JSON.$P$1];IF(ISNA([.$W352]);&quot;null&quot;;[.$W352]);[$JSON.$Q$1];[.$Y352];[$JSON.$R$1];IF([.$Z352];&quot;true&quot;;&quot;false&quot;);[$JSON.$S$1];[.$A352];[$JSON.$T$1];[.$B352];[$JSON.$U$1])" office:value-type="string" office:string-value="{&quot;id&quot;:&quot;4-42&quot;,&quot;name&quot;:&quot;紡績工場&quot;,&quot;displayName&quot;:&quot;紡績工場&quot;,&quot;kana&quot;:&quot;ぼうせきこうじょう&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rarity&quot;:1,&quot;type&quot;:2,&quot;level&quot;:2,&quot;color&quot;:1,&quot;term&quot;:0,&quot;trait&quot;:0,&quot;power&quot;:null,&quot;legacy&quot;:0,&quot;anyNumCopies&quot;:false,&quot;orderTable&quot;:351,&quot;orderDeck&quot;:305}," calcext:value-type="string">
            <text:p>{"id":"4-42","name":"紡績工場","displayName":"紡績工場","kana":"ぼうせきこうじょう","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rarity":1,"type":2,"level":2,"color":1,"term":0,"trait":0,"power":null,"legacy":0,"anyNumCopies":false,"orderTable":351,"orderDeck":305},</text:p>
          </table:table-cell>
          <table:table-cell table:number-columns-repeated="16356"/>
        </table:table-row>
        <table:table-row table:style-name="ro2">
          <table:table-cell table:style-name="ce11" office:value-type="float" office:value="352" calcext:value-type="float">
            <text:p>352</text:p>
          </table:table-cell>
          <table:table-cell table:style-name="ce11" office:value-type="float" office:value="301" calcext:value-type="float">
            <text:p>301</text:p>
          </table:table-cell>
          <table:table-cell table:style-name="ce21" office:value-type="string" calcext:value-type="string">
            <text:p>4-43</text:p>
          </table:table-cell>
          <table:table-cell table:style-name="ce21" office:value-type="float" office:value="43" calcext:value-type="float">
            <text:p>43</text:p>
          </table:table-cell>
          <table:table-cell table:style-name="ce11" office:value-type="string" calcext:value-type="string">
            <text:p>火と氷の大地</text:p>
          </table:table-cell>
          <table:table-cell table:style-name="ce11" table:formula="of:=[.E353]" office:value-type="string" office:string-value="火と氷の大地" calcext:value-type="string">
            <text:p>火と氷の大地</text:p>
          </table:table-cell>
          <table:table-cell table:style-name="ce11" office:value-type="string" calcext:value-type="string">
            <text:p>ひとこおりのだいち</text:p>
          </table:table-cell>
          <table:table-cell table:style-name="ce11" office:value-type="string" calcext:value-type="string">
            <text:p>第４弾ブースターパック</text:p>
          </table:table-cell>
          <table:table-cell table:style-name="ce11" table:formula="of:=VLOOKUP([.H353];[$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53];[$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3];[$種類番号.$A$1:$種類番号.$B$4];2;0)" office:value-type="float" office:value="2" calcext:value-type="float">
            <text:p>2</text:p>
          </table:table-cell>
          <table:table-cell table:style-name="ce11" office:value-type="string" calcext:value-type="string">
            <text:p>青</text:p>
          </table:table-cell>
          <table:table-cell table:style-name="ce11" table:formula="of:=VLOOKUP([.N353];[$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53];[$特性番号.$A$1:$特性番号.$B$8];2;0);0)" office:value-type="float" office:value="0" calcext:value-type="float">
            <text:p>0</text:p>
          </table:table-cell>
          <table:table-cell table:style-name="ce11"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5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3.png</text:p>
          </table:table-cell>
          <table:table-cell table:style-name="ce11" table:formula="of:=CONCATENATE([$JSON.$A$1];[.$C353];[$JSON.$B$1];[.$E353];[$JSON.$C$1];[.F353];[$JSON.$D$1];[.$G353];[$JSON.$E$1];IF(ISNA([.$T353]);&quot;null&quot;;&quot;&quot;&quot;&quot;&amp;[.$T353]&amp;&quot;&quot;&quot;&quot;);[$JSON.$F$1];[.$V353];[$JSON.$G$1];IF(ISNA([.$X353]);&quot;null&quot;;&quot;&quot;&quot;&quot;&amp;[.$X353]&amp;&quot;&quot;&quot;&quot;);[$JSON.$H$1];[.$AA353];[$JSON.$I$1];[.$I353];[$JSON.$J$1];[.K353];[$JSON.$K$1];[.$M353];[$JSON.$L$1];[.$P353];[$JSON.$M$1];[.$O353];[$JSON.$N$1];[.$S353];[$JSON.$O$1];[.$U353];[$JSON.$P$1];IF(ISNA([.$W353]);&quot;null&quot;;[.$W353]);[$JSON.$Q$1];[.$Y353];[$JSON.$R$1];IF([.$Z353];&quot;true&quot;;&quot;false&quot;);[$JSON.$S$1];[.$A353];[$JSON.$T$1];[.$B353];[$JSON.$U$1])" office:value-type="string" office:string-value="{&quot;id&quot;:&quot;4-43&quot;,&quot;name&quot;:&quot;火と氷の大地&quot;,&quot;displayName&quot;:&quot;火と氷の大地&quot;,&quot;kana&quot;:&quot;ひとこおりのだいち&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rarity&quot;:1,&quot;type&quot;:2,&quot;level&quot;:1,&quot;color&quot;:2,&quot;term&quot;:0,&quot;trait&quot;:0,&quot;power&quot;:null,&quot;legacy&quot;:5,&quot;anyNumCopies&quot;:false,&quot;orderTable&quot;:352,&quot;orderDeck&quot;:301}," calcext:value-type="string">
            <text:p>{"id":"4-43","name":"火と氷の大地","displayName":"火と氷の大地","kana":"ひとこおりのだいち","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rarity":1,"type":2,"level":1,"color":2,"term":0,"trait":0,"power":null,"legacy":5,"anyNumCopies":false,"orderTable":352,"orderDeck":301},</text:p>
          </table:table-cell>
          <table:table-cell table:number-columns-repeated="16356"/>
        </table:table-row>
        <table:table-row table:style-name="ro2">
          <table:table-cell table:style-name="ce11" office:value-type="float" office:value="353" calcext:value-type="float">
            <text:p>353</text:p>
          </table:table-cell>
          <table:table-cell table:style-name="ce11" office:value-type="float" office:value="350" calcext:value-type="float">
            <text:p>350</text:p>
          </table:table-cell>
          <table:table-cell table:style-name="ce21" office:value-type="string" calcext:value-type="string">
            <text:p>4-44</text:p>
          </table:table-cell>
          <table:table-cell table:style-name="ce21" office:value-type="float" office:value="44" calcext:value-type="float">
            <text:p>44</text:p>
          </table:table-cell>
          <table:table-cell table:style-name="ce11" office:value-type="string" calcext:value-type="string">
            <text:p>落日の王宮</text:p>
          </table:table-cell>
          <table:table-cell table:style-name="ce11" table:formula="of:=[.E354]" office:value-type="string" office:string-value="落日の王宮" calcext:value-type="string">
            <text:p>落日の王宮</text:p>
          </table:table-cell>
          <table:table-cell table:style-name="ce11" office:value-type="string" calcext:value-type="string">
            <text:p>らくじつのおうきゅう</text:p>
          </table:table-cell>
          <table:table-cell table:style-name="ce11" office:value-type="string" calcext:value-type="string">
            <text:p>第４弾ブースターパック</text:p>
          </table:table-cell>
          <table:table-cell table:style-name="ce11" table:formula="of:=VLOOKUP([.H354];[$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54];[$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4];[$種類番号.$A$1:$種類番号.$B$4];2;0)" office:value-type="float" office:value="2" calcext:value-type="float">
            <text:p>2</text:p>
          </table:table-cell>
          <table:table-cell table:style-name="ce11" office:value-type="string" calcext:value-type="string">
            <text:p>青</text:p>
          </table:table-cell>
          <table:table-cell table:style-name="ce11" table:formula="of:=VLOOKUP([.N354];[$色番号.$A$1:$色番号.$B$10];2;0)" office:value-type="float" office:value="2" calcext:value-type="float">
            <text:p>2</text:p>
          </table:table-cell>
          <table:table-cell table:style-name="ce11"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4];[$能力語番号.$A$1:$能力語番号.$B$11];2;0);0)" office:value-type="float" office:value="0" calcext:value-type="float">
            <text:p>0</text:p>
          </table:table-cell>
          <table:table-cell office:value-type="string" calcext:value-type="string">
            <text:p>美術 思想</text:p>
          </table:table-cell>
          <table:table-cell table:style-name="ce11" table:formula="of:=IFERROR(VLOOKUP([.$T354];[$特性番号.$A$1:$特性番号.$B$8];2;0);0)" office:value-type="float" office:value="10" calcext:value-type="float">
            <text:p>10</text:p>
          </table:table-cell>
          <table:table-cell table:style-name="ce11"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4];[$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4.png</text:p>
          </table:table-cell>
          <table:table-cell table:style-name="ce11" table:formula="of:=CONCATENATE([$JSON.$A$1];[.$C354];[$JSON.$B$1];[.$E354];[$JSON.$C$1];[.F354];[$JSON.$D$1];[.$G354];[$JSON.$E$1];IF(ISNA([.$T354]);&quot;null&quot;;&quot;&quot;&quot;&quot;&amp;[.$T354]&amp;&quot;&quot;&quot;&quot;);[$JSON.$F$1];[.$V354];[$JSON.$G$1];IF(ISNA([.$X354]);&quot;null&quot;;&quot;&quot;&quot;&quot;&amp;[.$X354]&amp;&quot;&quot;&quot;&quot;);[$JSON.$H$1];[.$AA354];[$JSON.$I$1];[.$I354];[$JSON.$J$1];[.K354];[$JSON.$K$1];[.$M354];[$JSON.$L$1];[.$P354];[$JSON.$M$1];[.$O354];[$JSON.$N$1];[.$S354];[$JSON.$O$1];[.$U354];[$JSON.$P$1];IF(ISNA([.$W354]);&quot;null&quot;;[.$W354]);[$JSON.$Q$1];[.$Y354];[$JSON.$R$1];IF([.$Z354];&quot;true&quot;;&quot;false&quot;);[$JSON.$S$1];[.$A354];[$JSON.$T$1];[.$B354];[$JSON.$U$1])" office:value-type="string" office:string-value="{&quot;id&quot;:&quot;4-44&quot;,&quot;name&quot;:&quot;落日の王宮&quot;,&quot;displayName&quot;:&quot;落日の王宮&quot;,&quot;kana&quot;:&quot;らくじつのおうきゅう&quot;,&quot;traitText&quot;:&quot;美術 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rarity&quot;:1,&quot;type&quot;:2,&quot;level&quot;:6,&quot;color&quot;:2,&quot;term&quot;:0,&quot;trait&quot;:10,&quot;power&quot;:null,&quot;legacy&quot;:0,&quot;anyNumCopies&quot;:false,&quot;orderTable&quot;:353,&quot;orderDeck&quot;:350}," calcext:value-type="string">
            <text:p>{"id":"4-44","name":"落日の王宮","displayName":"落日の王宮","kana":"らくじつのおうきゅう","traitText":"美術 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rarity":1,"type":2,"level":6,"color":2,"term":0,"trait":10,"power":null,"legacy":0,"anyNumCopies":false,"orderTable":353,"orderDeck":350},</text:p>
          </table:table-cell>
          <table:table-cell table:number-columns-repeated="16356"/>
        </table:table-row>
        <table:table-row table:style-name="ro2">
          <table:table-cell table:style-name="ce11" office:value-type="float" office:value="354" calcext:value-type="float">
            <text:p>354</text:p>
          </table:table-cell>
          <table:table-cell table:style-name="ce11" office:value-type="float" office:value="324" calcext:value-type="float">
            <text:p>324</text:p>
          </table:table-cell>
          <table:table-cell table:style-name="ce21" office:value-type="string" calcext:value-type="string">
            <text:p>4-45</text:p>
          </table:table-cell>
          <table:table-cell table:style-name="ce21" office:value-type="float" office:value="45" calcext:value-type="float">
            <text:p>45</text:p>
          </table:table-cell>
          <table:table-cell table:style-name="ce11" office:value-type="string" calcext:value-type="string">
            <text:p>遣外使節団</text:p>
          </table:table-cell>
          <table:table-cell table:style-name="ce11" table:formula="of:=[.E355]" office:value-type="string" office:string-value="遣外使節団" calcext:value-type="string">
            <text:p>遣外使節団</text:p>
          </table:table-cell>
          <table:table-cell table:style-name="ce11" office:value-type="string" calcext:value-type="string">
            <text:p>けんがいしせつだん</text:p>
          </table:table-cell>
          <table:table-cell table:style-name="ce11" office:value-type="string" calcext:value-type="string">
            <text:p>第４弾ブースターパック</text:p>
          </table:table-cell>
          <table:table-cell table:style-name="ce11" table:formula="of:=VLOOKUP([.H355];[$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55];[$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5];[$種類番号.$A$1:$種類番号.$B$4];2;0)" office:value-type="float" office:value="2" calcext:value-type="float">
            <text:p>2</text:p>
          </table:table-cell>
          <table:table-cell table:style-name="ce11" office:value-type="string" calcext:value-type="string">
            <text:p>緑</text:p>
          </table:table-cell>
          <table:table-cell table:style-name="ce11" table:formula="of:=VLOOKUP([.N355];[$色番号.$A$1:$色番号.$B$10];2;0)" office:value-type="float" office:value="4" calcext:value-type="float">
            <text:p>4</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55];[$特性番号.$A$1:$特性番号.$B$8];2;0);0)" office:value-type="float" office:value="0" calcext:value-type="float">
            <text:p>0</text:p>
          </table:table-cell>
          <table:table-cell table:style-name="ce11" office:value-type="string" calcext:value-type="string">
            <text:p>自分がイジン召喚する際、そのイジンのレベルは、相手の戦場の色1つにつき1だけ下が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5];[$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5.png</text:p>
          </table:table-cell>
          <table:table-cell table:style-name="ce11" table:formula="of:=CONCATENATE([$JSON.$A$1];[.$C355];[$JSON.$B$1];[.$E355];[$JSON.$C$1];[.F355];[$JSON.$D$1];[.$G355];[$JSON.$E$1];IF(ISNA([.$T355]);&quot;null&quot;;&quot;&quot;&quot;&quot;&amp;[.$T355]&amp;&quot;&quot;&quot;&quot;);[$JSON.$F$1];[.$V355];[$JSON.$G$1];IF(ISNA([.$X355]);&quot;null&quot;;&quot;&quot;&quot;&quot;&amp;[.$X355]&amp;&quot;&quot;&quot;&quot;);[$JSON.$H$1];[.$AA355];[$JSON.$I$1];[.$I355];[$JSON.$J$1];[.K355];[$JSON.$K$1];[.$M355];[$JSON.$L$1];[.$P355];[$JSON.$M$1];[.$O355];[$JSON.$N$1];[.$S355];[$JSON.$O$1];[.$U355];[$JSON.$P$1];IF(ISNA([.$W355]);&quot;null&quot;;[.$W355]);[$JSON.$Q$1];[.$Y355];[$JSON.$R$1];IF([.$Z355];&quot;true&quot;;&quot;false&quot;);[$JSON.$S$1];[.$A355];[$JSON.$T$1];[.$B355];[$JSON.$U$1])" office:value-type="string" office:string-value="{&quot;id&quot;:&quot;4-45&quot;,&quot;name&quot;:&quot;遣外使節団&quot;,&quot;displayName&quot;:&quot;遣外使節団&quot;,&quot;kana&quot;:&quot;けんがいしせつだん&quot;,&quot;traitText&quot;:null,&quot;ruleText&quot;:&quot;自分がイジン召喚する際、そのイジンのレベルは、相手の戦場の色1つにつき1だけ下がる。&quot;,&quot;legacyText&quot;:null,&quot;imageUrl&quot;:&quot;https://one-draw.jp/ijinden/cardlist/004/card/04_045.png&quot;,&quot;expansion&quot;:45,&quot;rarity&quot;:1,&quot;type&quot;:2,&quot;level&quot;:3,&quot;color&quot;:4,&quot;term&quot;:0,&quot;trait&quot;:0,&quot;power&quot;:null,&quot;legacy&quot;:0,&quot;anyNumCopies&quot;:false,&quot;orderTable&quot;:354,&quot;orderDeck&quot;:324}," calcext:value-type="string">
            <text:p>{"id":"4-45","name":"遣外使節団","displayName":"遣外使節団","kana":"けんがいしせつだん","traitText":null,"ruleText":"自分がイジン召喚する際、そのイジンのレベルは、相手の戦場の色1つにつき1だけ下がる。","legacyText":null,"imageUrl":"https://one-draw.jp/ijinden/cardlist/004/card/04_045.png","expansion":45,"rarity":1,"type":2,"level":3,"color":4,"term":0,"trait":0,"power":null,"legacy":0,"anyNumCopies":false,"orderTable":354,"orderDeck":324},</text:p>
          </table:table-cell>
          <table:table-cell table:number-columns-repeated="16356"/>
        </table:table-row>
        <table:table-row table:style-name="ro2">
          <table:table-cell table:style-name="ce11" office:value-type="float" office:value="355" calcext:value-type="float">
            <text:p>355</text:p>
          </table:table-cell>
          <table:table-cell table:style-name="ce11" office:value-type="float" office:value="357" calcext:value-type="float">
            <text:p>357</text:p>
          </table:table-cell>
          <table:table-cell table:style-name="ce21" office:value-type="string" calcext:value-type="string">
            <text:p>4-46</text:p>
          </table:table-cell>
          <table:table-cell table:style-name="ce21" office:value-type="float" office:value="46" calcext:value-type="float">
            <text:p>46</text:p>
          </table:table-cell>
          <table:table-cell table:style-name="ce11" office:value-type="string" calcext:value-type="string">
            <text:p>大日本沿海輿地全図</text:p>
          </table:table-cell>
          <table:table-cell table:style-name="ce11" table:formula="of:=[.E356]" office:value-type="string" office:string-value="大日本沿海輿地全図" calcext:value-type="string">
            <text:p>大日本沿海輿地全図</text:p>
          </table:table-cell>
          <table:table-cell table:style-name="ce11" office:value-type="string" calcext:value-type="string">
            <text:p>だいにほんえんかいよちぜんず</text:p>
          </table:table-cell>
          <table:table-cell table:style-name="ce11" office:value-type="string" calcext:value-type="string">
            <text:p>第４弾ブースターパック</text:p>
          </table:table-cell>
          <table:table-cell table:style-name="ce11" table:formula="of:=VLOOKUP([.H356];[$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56];[$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6];[$種類番号.$A$1:$種類番号.$B$4];2;0)" office:value-type="float" office:value="2" calcext:value-type="float">
            <text:p>2</text:p>
          </table:table-cell>
          <table:table-cell table:style-name="ce11" office:value-type="string" calcext:value-type="string">
            <text:p>緑</text:p>
          </table:table-cell>
          <table:table-cell table:style-name="ce11" table:formula="of:=VLOOKUP([.N356];[$色番号.$A$1:$色番号.$B$10];2;0)" office:value-type="float" office:value="4" calcext:value-type="float">
            <text:p>4</text:p>
          </table:table-cell>
          <table:table-cell table:style-name="ce11" office:value-type="float" office:value="17" calcext:value-type="float">
            <text:p>1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56];[$特性番号.$A$1:$特性番号.$B$8];2;0);0)" office:value-type="float" office:value="0" calcext:value-type="float">
            <text:p>0</text:p>
          </table:table-cell>
          <table:table-cell table:style-name="ce11"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5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6.png</text:p>
          </table:table-cell>
          <table:table-cell table:style-name="ce11" table:formula="of:=CONCATENATE([$JSON.$A$1];[.$C356];[$JSON.$B$1];[.$E356];[$JSON.$C$1];[.F356];[$JSON.$D$1];[.$G356];[$JSON.$E$1];IF(ISNA([.$T356]);&quot;null&quot;;&quot;&quot;&quot;&quot;&amp;[.$T356]&amp;&quot;&quot;&quot;&quot;);[$JSON.$F$1];[.$V356];[$JSON.$G$1];IF(ISNA([.$X356]);&quot;null&quot;;&quot;&quot;&quot;&quot;&amp;[.$X356]&amp;&quot;&quot;&quot;&quot;);[$JSON.$H$1];[.$AA356];[$JSON.$I$1];[.$I356];[$JSON.$J$1];[.K356];[$JSON.$K$1];[.$M356];[$JSON.$L$1];[.$P356];[$JSON.$M$1];[.$O356];[$JSON.$N$1];[.$S356];[$JSON.$O$1];[.$U356];[$JSON.$P$1];IF(ISNA([.$W356]);&quot;null&quot;;[.$W356]);[$JSON.$Q$1];[.$Y356];[$JSON.$R$1];IF([.$Z356];&quot;true&quot;;&quot;false&quot;);[$JSON.$S$1];[.$A356];[$JSON.$T$1];[.$B356];[$JSON.$U$1])" office:value-type="string" office:string-value="{&quot;id&quot;:&quot;4-46&quot;,&quot;name&quot;:&quot;大日本沿海輿地全図&quot;,&quot;displayName&quot;:&quot;大日本沿海輿地全図&quot;,&quot;kana&quot;:&quot;だいにほんえんかいよちぜんず&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rarity&quot;:1,&quot;type&quot;:2,&quot;level&quot;:17,&quot;color&quot;:4,&quot;term&quot;:0,&quot;trait&quot;:0,&quot;power&quot;:null,&quot;legacy&quot;:1,&quot;anyNumCopies&quot;:false,&quot;orderTable&quot;:355,&quot;orderDeck&quot;:357}," calcext:value-type="string">
            <text:p>{"id":"4-46","name":"大日本沿海輿地全図","displayName":"大日本沿海輿地全図","kana":"だいにほんえんかいよちぜんず","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rarity":1,"type":2,"level":17,"color":4,"term":0,"trait":0,"power":null,"legacy":1,"anyNumCopies":false,"orderTable":355,"orderDeck":357},</text:p>
          </table:table-cell>
          <table:table-cell table:number-columns-repeated="16356"/>
        </table:table-row>
        <table:table-row table:style-name="ro2">
          <table:table-cell table:style-name="ce11" office:value-type="float" office:value="356" calcext:value-type="float">
            <text:p>356</text:p>
          </table:table-cell>
          <table:table-cell table:style-name="ce11" office:value-type="float" office:value="328" calcext:value-type="float">
            <text:p>328</text:p>
          </table:table-cell>
          <table:table-cell table:style-name="ce21" office:value-type="string" calcext:value-type="string">
            <text:p>4-47</text:p>
          </table:table-cell>
          <table:table-cell table:style-name="ce21" office:value-type="float" office:value="47" calcext:value-type="float">
            <text:p>47</text:p>
          </table:table-cell>
          <table:table-cell table:style-name="ce11" office:value-type="string" calcext:value-type="string">
            <text:p>マザーグース</text:p>
          </table:table-cell>
          <table:table-cell table:style-name="ce11" table:formula="of:=[.E357]" office:value-type="string" office:string-value="マザーグース" calcext:value-type="string">
            <text:p>マザーグース</text:p>
          </table:table-cell>
          <table:table-cell table:style-name="ce11" office:value-type="string" calcext:value-type="string">
            <text:p>まざーぐーす</text:p>
          </table:table-cell>
          <table:table-cell table:style-name="ce11" office:value-type="string" calcext:value-type="string">
            <text:p>第４弾ブースターパック</text:p>
          </table:table-cell>
          <table:table-cell table:style-name="ce11" table:formula="of:=VLOOKUP([.H357];[$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57];[$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7];[$種類番号.$A$1:$種類番号.$B$4];2;0)" office:value-type="float" office:value="2" calcext:value-type="float">
            <text:p>2</text:p>
          </table:table-cell>
          <table:table-cell table:style-name="ce11" office:value-type="string" calcext:value-type="string">
            <text:p>黄</text:p>
          </table:table-cell>
          <table:table-cell table:style-name="ce11" table:formula="of:=VLOOKUP([.N357];[$色番号.$A$1:$色番号.$B$10];2;0)" office:value-type="float" office:value="8" calcext:value-type="float">
            <text:p>8</text:p>
          </table:table-cell>
          <table:table-cell table:style-name="ce11"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執筆</text:p>
          </table:table-cell>
          <table:table-cell table:style-name="ce11" table:formula="of:=IFERROR(VLOOKUP([.$R357];[$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357];[$特性番号.$A$1:$特性番号.$B$8];2;0);0)" office:value-type="float" office:value="0" calcext:value-type="float">
            <text:p>0</text:p>
          </table:table-cell>
          <table:table-cell table:style-name="ce11" office:value-type="string" calcext:value-type="string">
            <text:p>執筆 - ハイケイが戦場に置かれたときに発動できる。自分の戦場の黄のカード3つにつき1ドローして、これを破壊する。¶冥装¶装備 : 「特性：音楽」</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57];[$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7.png</text:p>
          </table:table-cell>
          <table:table-cell table:style-name="ce11" table:formula="of:=CONCATENATE([$JSON.$A$1];[.$C357];[$JSON.$B$1];[.$E357];[$JSON.$C$1];[.F357];[$JSON.$D$1];[.$G357];[$JSON.$E$1];IF(ISNA([.$T357]);&quot;null&quot;;&quot;&quot;&quot;&quot;&amp;[.$T357]&amp;&quot;&quot;&quot;&quot;);[$JSON.$F$1];[.$V357];[$JSON.$G$1];IF(ISNA([.$X357]);&quot;null&quot;;&quot;&quot;&quot;&quot;&amp;[.$X357]&amp;&quot;&quot;&quot;&quot;);[$JSON.$H$1];[.$AA357];[$JSON.$I$1];[.$I357];[$JSON.$J$1];[.K357];[$JSON.$K$1];[.$M357];[$JSON.$L$1];[.$P357];[$JSON.$M$1];[.$O357];[$JSON.$N$1];[.$S357];[$JSON.$O$1];[.$U357];[$JSON.$P$1];IF(ISNA([.$W357]);&quot;null&quot;;[.$W357]);[$JSON.$Q$1];[.$Y357];[$JSON.$R$1];IF([.$Z357];&quot;true&quot;;&quot;false&quot;);[$JSON.$S$1];[.$A357];[$JSON.$T$1];[.$B357];[$JSON.$U$1])" office:value-type="string" office:string-value="{&quot;id&quot;:&quot;4-47&quot;,&quot;name&quot;:&quot;マザーグース&quot;,&quot;displayName&quot;:&quot;マザーグース&quot;,&quot;kana&quot;:&quot;まざーぐーす&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rarity&quot;:1,&quot;type&quot;:2,&quot;level&quot;:3,&quot;color&quot;:8,&quot;term&quot;:2,&quot;trait&quot;:0,&quot;power&quot;:null,&quot;legacy&quot;:9,&quot;anyNumCopies&quot;:false,&quot;orderTable&quot;:356,&quot;orderDeck&quot;:328}," calcext:value-type="string">
            <text:p>{"id":"4-47","name":"マザーグース","displayName":"マザーグース","kana":"まざーぐーす","traitText":null,"ruleText":"執筆 - ハイケイが戦場に置かれたときに発動できる。自分の戦場の黄のカード3つにつき1ドローして、これを破壊する。¶冥装¶装備 : 「特性：音楽」","legacyText":"喪神","imageUrl":"https://one-draw.jp/ijinden/cardlist/004/card/04_047.png","expansion":45,"rarity":1,"type":2,"level":3,"color":8,"term":2,"trait":0,"power":null,"legacy":9,"anyNumCopies":false,"orderTable":356,"orderDeck":328},</text:p>
          </table:table-cell>
          <table:table-cell table:number-columns-repeated="16356"/>
        </table:table-row>
        <table:table-row table:style-name="ro2">
          <table:table-cell table:style-name="ce11" office:value-type="float" office:value="357" calcext:value-type="float">
            <text:p>357</text:p>
          </table:table-cell>
          <table:table-cell table:style-name="ce11" office:value-type="float" office:value="338" calcext:value-type="float">
            <text:p>338</text:p>
          </table:table-cell>
          <table:table-cell table:style-name="ce21" office:value-type="string" calcext:value-type="string">
            <text:p>4-48</text:p>
          </table:table-cell>
          <table:table-cell table:style-name="ce21" office:value-type="float" office:value="48" calcext:value-type="float">
            <text:p>48</text:p>
          </table:table-cell>
          <table:table-cell table:style-name="ce11" office:value-type="string" calcext:value-type="string">
            <text:p>遠征軍</text:p>
          </table:table-cell>
          <table:table-cell table:style-name="ce11" table:formula="of:=[.E358]" office:value-type="string" office:string-value="遠征軍" calcext:value-type="string">
            <text:p>遠征軍</text:p>
          </table:table-cell>
          <table:table-cell table:style-name="ce11" office:value-type="string" calcext:value-type="string">
            <text:p>えんせいぐん</text:p>
          </table:table-cell>
          <table:table-cell table:style-name="ce11" office:value-type="string" calcext:value-type="string">
            <text:p>第４弾ブースターパック</text:p>
          </table:table-cell>
          <table:table-cell table:style-name="ce11" table:formula="of:=VLOOKUP([.H358];[$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58];[$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8];[$種類番号.$A$1:$種類番号.$B$4];2;0)" office:value-type="float" office:value="2" calcext:value-type="float">
            <text:p>2</text:p>
          </table:table-cell>
          <table:table-cell table:style-name="ce11" office:value-type="string" calcext:value-type="string">
            <text:p>黄</text:p>
          </table:table-cell>
          <table:table-cell table:style-name="ce11" table:formula="of:=VLOOKUP([.N358];[$色番号.$A$1:$色番号.$B$10];2;0)" office:value-type="float" office:value="8" calcext:value-type="float">
            <text:p>8</text:p>
          </table:table-cell>
          <table:table-cell table:style-name="ce11"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58];[$特性番号.$A$1:$特性番号.$B$8];2;0);0)" office:value-type="float" office:value="0" calcext:value-type="float">
            <text:p>0</text:p>
          </table:table-cell>
          <table:table-cell table:style-name="ce11"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style-name="ce11" table:formula="of:=NA()" office:value-type="string" office:string-value="" calcext:value-type="error">
            <text:p>#N/A</text:p>
          </table:table-cell>
          <table:table-cell table:style-name="ce25" office:value-type="string" calcext:value-type="string">
            <text:p>山札の上か下に戻す</text:p>
          </table:table-cell>
          <table:table-cell table:style-name="ce11" table:formula="of:=IFERROR(VLOOKUP([.$X358];[$遺業能力番号.$A$1:$遺業能力番号.$B$9];2;0);0)" office:value-type="float" office:value="7" calcext:value-type="float">
            <text:p>7</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8.png</text:p>
          </table:table-cell>
          <table:table-cell table:style-name="ce11" table:formula="of:=CONCATENATE([$JSON.$A$1];[.$C358];[$JSON.$B$1];[.$E358];[$JSON.$C$1];[.F358];[$JSON.$D$1];[.$G358];[$JSON.$E$1];IF(ISNA([.$T358]);&quot;null&quot;;&quot;&quot;&quot;&quot;&amp;[.$T358]&amp;&quot;&quot;&quot;&quot;);[$JSON.$F$1];[.$V358];[$JSON.$G$1];IF(ISNA([.$X358]);&quot;null&quot;;&quot;&quot;&quot;&quot;&amp;[.$X358]&amp;&quot;&quot;&quot;&quot;);[$JSON.$H$1];[.$AA358];[$JSON.$I$1];[.$I358];[$JSON.$J$1];[.K358];[$JSON.$K$1];[.$M358];[$JSON.$L$1];[.$P358];[$JSON.$M$1];[.$O358];[$JSON.$N$1];[.$S358];[$JSON.$O$1];[.$U358];[$JSON.$P$1];IF(ISNA([.$W358]);&quot;null&quot;;[.$W358]);[$JSON.$Q$1];[.$Y358];[$JSON.$R$1];IF([.$Z358];&quot;true&quot;;&quot;false&quot;);[$JSON.$S$1];[.$A358];[$JSON.$T$1];[.$B358];[$JSON.$U$1])" office:value-type="string" office:string-value="{&quot;id&quot;:&quot;4-48&quot;,&quot;name&quot;:&quot;遠征軍&quot;,&quot;displayName&quot;:&quot;遠征軍&quot;,&quot;kana&quot;:&quot;えんせいぐん&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rarity&quot;:1,&quot;type&quot;:2,&quot;level&quot;:4,&quot;color&quot;:8,&quot;term&quot;:0,&quot;trait&quot;:0,&quot;power&quot;:null,&quot;legacy&quot;:7,&quot;anyNumCopies&quot;:false,&quot;orderTable&quot;:357,&quot;orderDeck&quot;:338}," calcext:value-type="string">
            <text:p>{"id":"4-48","name":"遠征軍","displayName":"遠征軍","kana":"えんせいぐん","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rarity":1,"type":2,"level":4,"color":8,"term":0,"trait":0,"power":null,"legacy":7,"anyNumCopies":false,"orderTable":357,"orderDeck":338},</text:p>
          </table:table-cell>
          <table:table-cell table:number-columns-repeated="16356"/>
        </table:table-row>
        <table:table-row table:style-name="ro2">
          <table:table-cell table:style-name="ce11" office:value-type="float" office:value="358" calcext:value-type="float">
            <text:p>358</text:p>
          </table:table-cell>
          <table:table-cell table:style-name="ce11" office:value-type="float" office:value="346" calcext:value-type="float">
            <text:p>346</text:p>
          </table:table-cell>
          <table:table-cell table:style-name="ce21" office:value-type="string" calcext:value-type="string">
            <text:p>4-49</text:p>
          </table:table-cell>
          <table:table-cell table:style-name="ce21" office:value-type="float" office:value="49" calcext:value-type="float">
            <text:p>49</text:p>
          </table:table-cell>
          <table:table-cell table:style-name="ce11" office:value-type="string" calcext:value-type="string">
            <text:p>蝦夷共和国</text:p>
          </table:table-cell>
          <table:table-cell table:style-name="ce11" table:formula="of:=[.E359]" office:value-type="string" office:string-value="蝦夷共和国" calcext:value-type="string">
            <text:p>蝦夷共和国</text:p>
          </table:table-cell>
          <table:table-cell table:style-name="ce11" office:value-type="string" calcext:value-type="string">
            <text:p>えぞきょうわこく</text:p>
          </table:table-cell>
          <table:table-cell table:style-name="ce11" office:value-type="string" calcext:value-type="string">
            <text:p>第４弾ブースターパック</text:p>
          </table:table-cell>
          <table:table-cell table:style-name="ce11" table:formula="of:=VLOOKUP([.H359];[$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59];[$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59];[$種類番号.$A$1:$種類番号.$B$4];2;0)" office:value-type="float" office:value="2" calcext:value-type="float">
            <text:p>2</text:p>
          </table:table-cell>
          <table:table-cell table:style-name="ce11" office:value-type="string" calcext:value-type="string">
            <text:p>紫</text:p>
          </table:table-cell>
          <table:table-cell table:style-name="ce11" table:formula="of:=VLOOKUP([.N359];[$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5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59];[$特性番号.$A$1:$特性番号.$B$8];2;0);0)" office:value-type="float" office:value="0" calcext:value-type="float">
            <text:p>0</text:p>
          </table:table-cell>
          <table:table-cell table:style-name="ce11"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59];[$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49.png</text:p>
          </table:table-cell>
          <table:table-cell table:style-name="ce11" table:formula="of:=CONCATENATE([$JSON.$A$1];[.$C359];[$JSON.$B$1];[.$E359];[$JSON.$C$1];[.F359];[$JSON.$D$1];[.$G359];[$JSON.$E$1];IF(ISNA([.$T359]);&quot;null&quot;;&quot;&quot;&quot;&quot;&amp;[.$T359]&amp;&quot;&quot;&quot;&quot;);[$JSON.$F$1];[.$V359];[$JSON.$G$1];IF(ISNA([.$X359]);&quot;null&quot;;&quot;&quot;&quot;&quot;&amp;[.$X359]&amp;&quot;&quot;&quot;&quot;);[$JSON.$H$1];[.$AA359];[$JSON.$I$1];[.$I359];[$JSON.$J$1];[.K359];[$JSON.$K$1];[.$M359];[$JSON.$L$1];[.$P359];[$JSON.$M$1];[.$O359];[$JSON.$N$1];[.$S359];[$JSON.$O$1];[.$U359];[$JSON.$P$1];IF(ISNA([.$W359]);&quot;null&quot;;[.$W359]);[$JSON.$Q$1];[.$Y359];[$JSON.$R$1];IF([.$Z359];&quot;true&quot;;&quot;false&quot;);[$JSON.$S$1];[.$A359];[$JSON.$T$1];[.$B359];[$JSON.$U$1])" office:value-type="string" office:string-value="{&quot;id&quot;:&quot;4-49&quot;,&quot;name&quot;:&quot;蝦夷共和国&quot;,&quot;displayName&quot;:&quot;蝦夷共和国&quot;,&quot;kana&quot;:&quot;えぞきょうわこく&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rarity&quot;:1,&quot;type&quot;:2,&quot;level&quot;:5,&quot;color&quot;:16,&quot;term&quot;:0,&quot;trait&quot;:0,&quot;power&quot;:null,&quot;legacy&quot;:0,&quot;anyNumCopies&quot;:false,&quot;orderTable&quot;:358,&quot;orderDeck&quot;:346}," calcext:value-type="string">
            <text:p>{"id":"4-49","name":"蝦夷共和国","displayName":"蝦夷共和国","kana":"えぞきょうわこく","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rarity":1,"type":2,"level":5,"color":16,"term":0,"trait":0,"power":null,"legacy":0,"anyNumCopies":false,"orderTable":358,"orderDeck":346},</text:p>
          </table:table-cell>
          <table:table-cell table:number-columns-repeated="16356"/>
        </table:table-row>
        <table:table-row table:style-name="ro2">
          <table:table-cell table:style-name="ce11" office:value-type="float" office:value="359" calcext:value-type="float">
            <text:p>359</text:p>
          </table:table-cell>
          <table:table-cell table:style-name="ce11" office:value-type="float" office:value="347" calcext:value-type="float">
            <text:p>347</text:p>
          </table:table-cell>
          <table:table-cell table:style-name="ce21" office:value-type="string" calcext:value-type="string">
            <text:p>4-50</text:p>
          </table:table-cell>
          <table:table-cell table:style-name="ce21" office:value-type="float" office:value="50" calcext:value-type="float">
            <text:p>50</text:p>
          </table:table-cell>
          <table:table-cell table:style-name="ce11" office:value-type="string" calcext:value-type="string">
            <text:p>喀血の流行り病</text:p>
          </table:table-cell>
          <table:table-cell table:style-name="ce11" table:formula="of:=[.E360]" office:value-type="string" office:string-value="喀血の流行り病" calcext:value-type="string">
            <text:p>喀血の流行り病</text:p>
          </table:table-cell>
          <table:table-cell table:style-name="ce11" office:value-type="string" calcext:value-type="string">
            <text:p>かっけつのはやりやまい</text:p>
          </table:table-cell>
          <table:table-cell table:style-name="ce11" office:value-type="string" calcext:value-type="string">
            <text:p>第４弾ブースターパック</text:p>
          </table:table-cell>
          <table:table-cell table:style-name="ce11" table:formula="of:=VLOOKUP([.H360];[$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60];[$レアリティ番号.$A$1:$レアリティ番号.$B$4];2;0)" office:value-type="float" office:value="1" calcext:value-type="float">
            <text:p>1</text:p>
          </table:table-cell>
          <table:table-cell table:style-name="ce11" office:value-type="string" calcext:value-type="string">
            <text:p>ハイケイ</text:p>
          </table:table-cell>
          <table:table-cell table:style-name="ce11" table:formula="of:=VLOOKUP([.L360];[$種類番号.$A$1:$種類番号.$B$4];2;0)" office:value-type="float" office:value="2" calcext:value-type="float">
            <text:p>2</text:p>
          </table:table-cell>
          <table:table-cell table:style-name="ce11" office:value-type="string" calcext:value-type="string">
            <text:p>紫</text:p>
          </table:table-cell>
          <table:table-cell table:style-name="ce11" table:formula="of:=VLOOKUP([.N360];[$色番号.$A$1:$色番号.$B$10];2;0)" office:value-type="float" office:value="16" calcext:value-type="float">
            <text:p>16</text:p>
          </table:table-cell>
          <table:table-cell table:style-name="ce11"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6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60];[$特性番号.$A$1:$特性番号.$B$8];2;0);0)" office:value-type="float" office:value="0" calcext:value-type="float">
            <text:p>0</text:p>
          </table:table-cell>
          <table:table-cell table:style-name="ce11"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style-name="ce11"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360];[$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0.png</text:p>
          </table:table-cell>
          <table:table-cell table:style-name="ce11" table:formula="of:=CONCATENATE([$JSON.$A$1];[.$C360];[$JSON.$B$1];[.$E360];[$JSON.$C$1];[.F360];[$JSON.$D$1];[.$G360];[$JSON.$E$1];IF(ISNA([.$T360]);&quot;null&quot;;&quot;&quot;&quot;&quot;&amp;[.$T360]&amp;&quot;&quot;&quot;&quot;);[$JSON.$F$1];[.$V360];[$JSON.$G$1];IF(ISNA([.$X360]);&quot;null&quot;;&quot;&quot;&quot;&quot;&amp;[.$X360]&amp;&quot;&quot;&quot;&quot;);[$JSON.$H$1];[.$AA360];[$JSON.$I$1];[.$I360];[$JSON.$J$1];[.K360];[$JSON.$K$1];[.$M360];[$JSON.$L$1];[.$P360];[$JSON.$M$1];[.$O360];[$JSON.$N$1];[.$S360];[$JSON.$O$1];[.$U360];[$JSON.$P$1];IF(ISNA([.$W360]);&quot;null&quot;;[.$W360]);[$JSON.$Q$1];[.$Y360];[$JSON.$R$1];IF([.$Z360];&quot;true&quot;;&quot;false&quot;);[$JSON.$S$1];[.$A360];[$JSON.$T$1];[.$B360];[$JSON.$U$1])" office:value-type="string" office:string-value="{&quot;id&quot;:&quot;4-50&quot;,&quot;name&quot;:&quot;喀血の流行り病&quot;,&quot;displayName&quot;:&quot;喀血の流行り病&quot;,&quot;kana&quot;:&quot;かっけつのはやりやまい&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rarity&quot;:1,&quot;type&quot;:2,&quot;level&quot;:5,&quot;color&quot;:16,&quot;term&quot;:0,&quot;trait&quot;:0,&quot;power&quot;:null,&quot;legacy&quot;:0,&quot;anyNumCopies&quot;:false,&quot;orderTable&quot;:359,&quot;orderDeck&quot;:347}," calcext:value-type="string">
            <text:p>{"id":"4-50","name":"喀血の流行り病","displayName":"喀血の流行り病","kana":"かっけつのはやりやまい","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rarity":1,"type":2,"level":5,"color":16,"term":0,"trait":0,"power":null,"legacy":0,"anyNumCopies":false,"orderTable":359,"orderDeck":347},</text:p>
          </table:table-cell>
          <table:table-cell table:number-columns-repeated="16356"/>
        </table:table-row>
        <table:table-row table:style-name="ro2">
          <table:table-cell table:style-name="ce11" office:value-type="float" office:value="360" calcext:value-type="float">
            <text:p>360</text:p>
          </table:table-cell>
          <table:table-cell table:style-name="ce11" office:value-type="float" office:value="359" calcext:value-type="float">
            <text:p>359</text:p>
          </table:table-cell>
          <table:table-cell table:style-name="ce21" office:value-type="string" calcext:value-type="string">
            <text:p>4-51</text:p>
          </table:table-cell>
          <table:table-cell table:style-name="ce21" office:value-type="float" office:value="51" calcext:value-type="float">
            <text:p>51</text:p>
          </table:table-cell>
          <table:table-cell table:style-name="ce11" office:value-type="string" calcext:value-type="string">
            <text:p>カーバナイズ</text:p>
          </table:table-cell>
          <table:table-cell table:style-name="ce11" table:formula="of:=[.E361]" office:value-type="string" office:string-value="カーバナイズ" calcext:value-type="string">
            <text:p>カーバナイズ</text:p>
          </table:table-cell>
          <table:table-cell table:style-name="ce11" office:value-type="string" calcext:value-type="string">
            <text:p>かーばないず</text:p>
          </table:table-cell>
          <table:table-cell table:style-name="ce11" office:value-type="string" calcext:value-type="string">
            <text:p>第４弾ブースターパック</text:p>
          </table:table-cell>
          <table:table-cell table:style-name="ce11" table:formula="of:=VLOOKUP([.H361];[$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6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1];[$種類番号.$A$1:$種類番号.$B$4];2;0)" office:value-type="float" office:value="3" calcext:value-type="float">
            <text:p>3</text:p>
          </table:table-cell>
          <table:table-cell table:style-name="ce11" office:value-type="string" calcext:value-type="string">
            <text:p>赤</text:p>
          </table:table-cell>
          <table:table-cell table:style-name="ce11" table:formula="of:=VLOOKUP([.N361];[$色番号.$A$1:$色番号.$B$10];2;0)" office:value-type="float" office:value="1" calcext:value-type="float">
            <text:p>1</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61];[$特性番号.$A$1:$特性番号.$B$8];2;0);0)" office:value-type="float" office:value="0" calcext:value-type="float">
            <text:p>0</text:p>
          </table:table-cell>
          <table:table-cell table:style-name="ce11"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1.png</text:p>
          </table:table-cell>
          <table:table-cell table:style-name="ce11" table:formula="of:=CONCATENATE([$JSON.$A$1];[.$C361];[$JSON.$B$1];[.$E361];[$JSON.$C$1];[.F361];[$JSON.$D$1];[.$G361];[$JSON.$E$1];IF(ISNA([.$T361]);&quot;null&quot;;&quot;&quot;&quot;&quot;&amp;[.$T361]&amp;&quot;&quot;&quot;&quot;);[$JSON.$F$1];[.$V361];[$JSON.$G$1];IF(ISNA([.$X361]);&quot;null&quot;;&quot;&quot;&quot;&quot;&amp;[.$X361]&amp;&quot;&quot;&quot;&quot;);[$JSON.$H$1];[.$AA361];[$JSON.$I$1];[.$I361];[$JSON.$J$1];[.K361];[$JSON.$K$1];[.$M361];[$JSON.$L$1];[.$P361];[$JSON.$M$1];[.$O361];[$JSON.$N$1];[.$S361];[$JSON.$O$1];[.$U361];[$JSON.$P$1];IF(ISNA([.$W361]);&quot;null&quot;;[.$W361]);[$JSON.$Q$1];[.$Y361];[$JSON.$R$1];IF([.$Z361];&quot;true&quot;;&quot;false&quot;);[$JSON.$S$1];[.$A361];[$JSON.$T$1];[.$B361];[$JSON.$U$1])" office:value-type="string" office:string-value="{&quot;id&quot;:&quot;4-51&quot;,&quot;name&quot;:&quot;カーバナイズ&quot;,&quot;displayName&quot;:&quot;カーバナイズ&quot;,&quot;kana&quot;:&quot;かーばないず&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rarity&quot;:1,&quot;type&quot;:3,&quot;level&quot;:1,&quot;color&quot;:1,&quot;term&quot;:0,&quot;trait&quot;:0,&quot;power&quot;:null,&quot;legacy&quot;:2,&quot;anyNumCopies&quot;:false,&quot;orderTable&quot;:360,&quot;orderDeck&quot;:359}," calcext:value-type="string">
            <text:p>{"id":"4-51","name":"カーバナイズ","displayName":"カーバナイズ","kana":"かーばないず","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rarity":1,"type":3,"level":1,"color":1,"term":0,"trait":0,"power":null,"legacy":2,"anyNumCopies":false,"orderTable":360,"orderDeck":359},</text:p>
          </table:table-cell>
          <table:table-cell table:number-columns-repeated="16356"/>
        </table:table-row>
        <table:table-row table:style-name="ro2">
          <table:table-cell table:style-name="ce11" office:value-type="float" office:value="361" calcext:value-type="float">
            <text:p>361</text:p>
          </table:table-cell>
          <table:table-cell table:style-name="ce11" office:value-type="float" office:value="412" calcext:value-type="float">
            <text:p>412</text:p>
          </table:table-cell>
          <table:table-cell table:style-name="ce21" office:value-type="string" calcext:value-type="string">
            <text:p>4-52</text:p>
          </table:table-cell>
          <table:table-cell table:style-name="ce21" office:value-type="float" office:value="52" calcext:value-type="float">
            <text:p>52</text:p>
          </table:table-cell>
          <table:table-cell table:style-name="ce11" office:value-type="string" calcext:value-type="string">
            <text:p>ソーラーフレア</text:p>
          </table:table-cell>
          <table:table-cell table:style-name="ce11" table:formula="of:=[.E362]" office:value-type="string" office:string-value="ソーラーフレア" calcext:value-type="string">
            <text:p>ソーラーフレア</text:p>
          </table:table-cell>
          <table:table-cell table:style-name="ce11" office:value-type="string" calcext:value-type="string">
            <text:p>そーらーふれあ</text:p>
          </table:table-cell>
          <table:table-cell table:style-name="ce11" office:value-type="string" calcext:value-type="string">
            <text:p>第４弾ブースターパック</text:p>
          </table:table-cell>
          <table:table-cell table:style-name="ce11" table:formula="of:=VLOOKUP([.H362];[$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6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2];[$種類番号.$A$1:$種類番号.$B$4];2;0)" office:value-type="float" office:value="3" calcext:value-type="float">
            <text:p>3</text:p>
          </table:table-cell>
          <table:table-cell table:style-name="ce11" office:value-type="string" calcext:value-type="string">
            <text:p>赤</text:p>
          </table:table-cell>
          <table:table-cell table:style-name="ce11" table:formula="of:=VLOOKUP([.N362];[$色番号.$A$1:$色番号.$B$10];2;0)" office:value-type="float" office:value="1" calcext:value-type="float">
            <text:p>1</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62];[$特性番号.$A$1:$特性番号.$B$8];2;0);0)" office:value-type="float" office:value="0" calcext:value-type="float">
            <text:p>0</text:p>
          </table:table-cell>
          <table:table-cell table:style-name="ce11"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2.png</text:p>
          </table:table-cell>
          <table:table-cell table:style-name="ce11" table:formula="of:=CONCATENATE([$JSON.$A$1];[.$C362];[$JSON.$B$1];[.$E362];[$JSON.$C$1];[.F362];[$JSON.$D$1];[.$G362];[$JSON.$E$1];IF(ISNA([.$T362]);&quot;null&quot;;&quot;&quot;&quot;&quot;&amp;[.$T362]&amp;&quot;&quot;&quot;&quot;);[$JSON.$F$1];[.$V362];[$JSON.$G$1];IF(ISNA([.$X362]);&quot;null&quot;;&quot;&quot;&quot;&quot;&amp;[.$X362]&amp;&quot;&quot;&quot;&quot;);[$JSON.$H$1];[.$AA362];[$JSON.$I$1];[.$I362];[$JSON.$J$1];[.K362];[$JSON.$K$1];[.$M362];[$JSON.$L$1];[.$P362];[$JSON.$M$1];[.$O362];[$JSON.$N$1];[.$S362];[$JSON.$O$1];[.$U362];[$JSON.$P$1];IF(ISNA([.$W362]);&quot;null&quot;;[.$W362]);[$JSON.$Q$1];[.$Y362];[$JSON.$R$1];IF([.$Z362];&quot;true&quot;;&quot;false&quot;);[$JSON.$S$1];[.$A362];[$JSON.$T$1];[.$B362];[$JSON.$U$1])" office:value-type="string" office:string-value="{&quot;id&quot;:&quot;4-52&quot;,&quot;name&quot;:&quot;ソーラーフレア&quot;,&quot;displayName&quot;:&quot;ソーラーフレア&quot;,&quot;kana&quot;:&quot;そーらーふれあ&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rarity&quot;:1,&quot;type&quot;:3,&quot;level&quot;:5,&quot;color&quot;:1,&quot;term&quot;:0,&quot;trait&quot;:0,&quot;power&quot;:null,&quot;legacy&quot;:2,&quot;anyNumCopies&quot;:false,&quot;orderTable&quot;:361,&quot;orderDeck&quot;:412}," calcext:value-type="string">
            <text:p>{"id":"4-52","name":"ソーラーフレア","displayName":"ソーラーフレア","kana":"そーらーふれあ","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rarity":1,"type":3,"level":5,"color":1,"term":0,"trait":0,"power":null,"legacy":2,"anyNumCopies":false,"orderTable":361,"orderDeck":412},</text:p>
          </table:table-cell>
          <table:table-cell table:number-columns-repeated="16356"/>
        </table:table-row>
        <table:table-row table:style-name="ro2">
          <table:table-cell table:style-name="ce11" office:value-type="float" office:value="362" calcext:value-type="float">
            <text:p>362</text:p>
          </table:table-cell>
          <table:table-cell table:style-name="ce11" office:value-type="float" office:value="358" calcext:value-type="float">
            <text:p>358</text:p>
          </table:table-cell>
          <table:table-cell table:style-name="ce21" office:value-type="string" calcext:value-type="string">
            <text:p>4-53</text:p>
          </table:table-cell>
          <table:table-cell table:style-name="ce21" office:value-type="float" office:value="53" calcext:value-type="float">
            <text:p>53</text:p>
          </table:table-cell>
          <table:table-cell table:style-name="ce11" office:value-type="string" calcext:value-type="string">
            <text:p>フール</text:p>
          </table:table-cell>
          <table:table-cell table:style-name="ce11" table:formula="of:=[.E363]" office:value-type="string" office:string-value="フール" calcext:value-type="string">
            <text:p>フール</text:p>
          </table:table-cell>
          <table:table-cell table:style-name="ce11" office:value-type="string" calcext:value-type="string">
            <text:p>ふーる</text:p>
          </table:table-cell>
          <table:table-cell table:style-name="ce11" office:value-type="string" calcext:value-type="string">
            <text:p>第４弾ブースターパック</text:p>
          </table:table-cell>
          <table:table-cell table:style-name="ce11" table:formula="of:=VLOOKUP([.H363];[$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6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3];[$種類番号.$A$1:$種類番号.$B$4];2;0)" office:value-type="float" office:value="3" calcext:value-type="float">
            <text:p>3</text:p>
          </table:table-cell>
          <table:table-cell table:style-name="ce11" office:value-type="string" calcext:value-type="string">
            <text:p>青</text:p>
          </table:table-cell>
          <table:table-cell table:style-name="ce11" table:formula="of:=VLOOKUP([.N363];[$色番号.$A$1:$色番号.$B$10];2;0)" office:value-type="float" office:value="2" calcext:value-type="float">
            <text:p>2</text:p>
          </table:table-cell>
          <table:table-cell table:number-columns-repeated="2"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63];[$特性番号.$A$1:$特性番号.$B$8];2;0);0)" office:value-type="float" office:value="0" calcext:value-type="float">
            <text:p>0</text:p>
          </table:table-cell>
          <table:table-cell table:style-name="ce11" office:value-type="string" calcext:value-type="string">
            <text:p>自分の墓地のマホウのレベルの合計が1以上なら、自分の手札の他のカード1つを墓地に置く。そうでなければ、1ドローする。</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63];[$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3.png</text:p>
          </table:table-cell>
          <table:table-cell table:style-name="ce11" table:formula="of:=CONCATENATE([$JSON.$A$1];[.$C363];[$JSON.$B$1];[.$E363];[$JSON.$C$1];[.F363];[$JSON.$D$1];[.$G363];[$JSON.$E$1];IF(ISNA([.$T363]);&quot;null&quot;;&quot;&quot;&quot;&quot;&amp;[.$T363]&amp;&quot;&quot;&quot;&quot;);[$JSON.$F$1];[.$V363];[$JSON.$G$1];IF(ISNA([.$X363]);&quot;null&quot;;&quot;&quot;&quot;&quot;&amp;[.$X363]&amp;&quot;&quot;&quot;&quot;);[$JSON.$H$1];[.$AA363];[$JSON.$I$1];[.$I363];[$JSON.$J$1];[.K363];[$JSON.$K$1];[.$M363];[$JSON.$L$1];[.$P363];[$JSON.$M$1];[.$O363];[$JSON.$N$1];[.$S363];[$JSON.$O$1];[.$U363];[$JSON.$P$1];IF(ISNA([.$W363]);&quot;null&quot;;[.$W363]);[$JSON.$Q$1];[.$Y363];[$JSON.$R$1];IF([.$Z363];&quot;true&quot;;&quot;false&quot;);[$JSON.$S$1];[.$A363];[$JSON.$T$1];[.$B363];[$JSON.$U$1])" office:value-type="string" office:string-value="{&quot;id&quot;:&quot;4-53&quot;,&quot;name&quot;:&quot;フール&quot;,&quot;displayName&quot;:&quot;フール&quot;,&quot;kana&quot;:&quot;ふーる&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rarity&quot;:1,&quot;type&quot;:3,&quot;level&quot;:0,&quot;color&quot;:2,&quot;term&quot;:0,&quot;trait&quot;:0,&quot;power&quot;:null,&quot;legacy&quot;:4,&quot;anyNumCopies&quot;:false,&quot;orderTable&quot;:362,&quot;orderDeck&quot;:358}," calcext:value-type="string">
            <text:p>{"id":"4-53","name":"フール","displayName":"フール","kana":"ふーる","traitText":null,"ruleText":"自分の墓地のマホウのレベルの合計が1以上なら、自分の手札の他のカード1つを墓地に置く。そうでなければ、1ドローする。","legacyText":"1ドローする","imageUrl":"https://one-draw.jp/ijinden/cardlist/004/card/04_053.png","expansion":45,"rarity":1,"type":3,"level":0,"color":2,"term":0,"trait":0,"power":null,"legacy":4,"anyNumCopies":false,"orderTable":362,"orderDeck":358},</text:p>
          </table:table-cell>
          <table:table-cell table:number-columns-repeated="16356"/>
        </table:table-row>
        <table:table-row table:style-name="ro2">
          <table:table-cell table:style-name="ce11" office:value-type="float" office:value="363" calcext:value-type="float">
            <text:p>363</text:p>
          </table:table-cell>
          <table:table-cell table:style-name="ce11" office:value-type="float" office:value="360" calcext:value-type="float">
            <text:p>360</text:p>
          </table:table-cell>
          <table:table-cell table:style-name="ce21" office:value-type="string" calcext:value-type="string">
            <text:p>4-54</text:p>
          </table:table-cell>
          <table:table-cell table:style-name="ce21" office:value-type="float" office:value="54" calcext:value-type="float">
            <text:p>54</text:p>
          </table:table-cell>
          <table:table-cell table:style-name="ce11" office:value-type="string" calcext:value-type="string">
            <text:p>ドロレス</text:p>
          </table:table-cell>
          <table:table-cell table:style-name="ce11" table:formula="of:=[.E364]" office:value-type="string" office:string-value="ドロレス" calcext:value-type="string">
            <text:p>ドロレス</text:p>
          </table:table-cell>
          <table:table-cell table:style-name="ce11" office:value-type="string" calcext:value-type="string">
            <text:p>どろれす</text:p>
          </table:table-cell>
          <table:table-cell table:style-name="ce11" office:value-type="string" calcext:value-type="string">
            <text:p>第４弾ブースターパック</text:p>
          </table:table-cell>
          <table:table-cell table:style-name="ce11" table:formula="of:=VLOOKUP([.H364];[$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6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4];[$種類番号.$A$1:$種類番号.$B$4];2;0)" office:value-type="float" office:value="3" calcext:value-type="float">
            <text:p>3</text:p>
          </table:table-cell>
          <table:table-cell table:style-name="ce11" office:value-type="string" calcext:value-type="string">
            <text:p>青</text:p>
          </table:table-cell>
          <table:table-cell table:style-name="ce11" table:formula="of:=VLOOKUP([.N364];[$色番号.$A$1:$色番号.$B$10];2;0)" office:value-type="float" office:value="2" calcext:value-type="float">
            <text:p>2</text:p>
          </table:table-cell>
          <table:table-cell table:number-columns-repeated="2"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64];[$特性番号.$A$1:$特性番号.$B$8];2;0);0)" office:value-type="float" office:value="0" calcext:value-type="float">
            <text:p>0</text:p>
          </table:table-cell>
          <table:table-cell table:style-name="ce11" office:value-type="string" calcext:value-type="string">
            <text:p>相手の手札を見てレベル3以上のカード1つを墓地に置く。</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4.png</text:p>
          </table:table-cell>
          <table:table-cell table:style-name="ce11" table:formula="of:=CONCATENATE([$JSON.$A$1];[.$C364];[$JSON.$B$1];[.$E364];[$JSON.$C$1];[.F364];[$JSON.$D$1];[.$G364];[$JSON.$E$1];IF(ISNA([.$T364]);&quot;null&quot;;&quot;&quot;&quot;&quot;&amp;[.$T364]&amp;&quot;&quot;&quot;&quot;);[$JSON.$F$1];[.$V364];[$JSON.$G$1];IF(ISNA([.$X364]);&quot;null&quot;;&quot;&quot;&quot;&quot;&amp;[.$X364]&amp;&quot;&quot;&quot;&quot;);[$JSON.$H$1];[.$AA364];[$JSON.$I$1];[.$I364];[$JSON.$J$1];[.K364];[$JSON.$K$1];[.$M364];[$JSON.$L$1];[.$P364];[$JSON.$M$1];[.$O364];[$JSON.$N$1];[.$S364];[$JSON.$O$1];[.$U364];[$JSON.$P$1];IF(ISNA([.$W364]);&quot;null&quot;;[.$W364]);[$JSON.$Q$1];[.$Y364];[$JSON.$R$1];IF([.$Z364];&quot;true&quot;;&quot;false&quot;);[$JSON.$S$1];[.$A364];[$JSON.$T$1];[.$B364];[$JSON.$U$1])" office:value-type="string" office:string-value="{&quot;id&quot;:&quot;4-54&quot;,&quot;name&quot;:&quot;ドロレス&quot;,&quot;displayName&quot;:&quot;ドロレス&quot;,&quot;kana&quot;:&quot;どろれす&quot;,&quot;traitText&quot;:null,&quot;ruleText&quot;:&quot;相手の手札を見てレベル3以上のカード1つを墓地に置く。&quot;,&quot;legacyText&quot;:&quot;冥府発動&quot;,&quot;imageUrl&quot;:&quot;https://one-draw.jp/ijinden/cardlist/004/card/04_054.png&quot;,&quot;expansion&quot;:45,&quot;rarity&quot;:1,&quot;type&quot;:3,&quot;level&quot;:1,&quot;color&quot;:2,&quot;term&quot;:0,&quot;trait&quot;:0,&quot;power&quot;:null,&quot;legacy&quot;:2,&quot;anyNumCopies&quot;:false,&quot;orderTable&quot;:363,&quot;orderDeck&quot;:360}," calcext:value-type="string">
            <text:p>{"id":"4-54","name":"ドロレス","displayName":"ドロレス","kana":"どろれす","traitText":null,"ruleText":"相手の手札を見てレベル3以上のカード1つを墓地に置く。","legacyText":"冥府発動","imageUrl":"https://one-draw.jp/ijinden/cardlist/004/card/04_054.png","expansion":45,"rarity":1,"type":3,"level":1,"color":2,"term":0,"trait":0,"power":null,"legacy":2,"anyNumCopies":false,"orderTable":363,"orderDeck":360},</text:p>
          </table:table-cell>
          <table:table-cell table:number-columns-repeated="16356"/>
        </table:table-row>
        <table:table-row table:style-name="ro2">
          <table:table-cell table:style-name="ce11" office:value-type="float" office:value="364" calcext:value-type="float">
            <text:p>364</text:p>
          </table:table-cell>
          <table:table-cell table:style-name="ce11" office:value-type="float" office:value="415" calcext:value-type="float">
            <text:p>415</text:p>
          </table:table-cell>
          <table:table-cell table:style-name="ce21" office:value-type="string" calcext:value-type="string">
            <text:p>4-55</text:p>
          </table:table-cell>
          <table:table-cell table:style-name="ce21" office:value-type="float" office:value="55" calcext:value-type="float">
            <text:p>55</text:p>
          </table:table-cell>
          <table:table-cell table:style-name="ce11" office:value-type="string" calcext:value-type="string">
            <text:p>デュエル</text:p>
          </table:table-cell>
          <table:table-cell table:style-name="ce11" table:formula="of:=[.E365]" office:value-type="string" office:string-value="デュエル" calcext:value-type="string">
            <text:p>デュエル</text:p>
          </table:table-cell>
          <table:table-cell table:style-name="ce11" office:value-type="string" calcext:value-type="string">
            <text:p>でゅえる</text:p>
          </table:table-cell>
          <table:table-cell table:style-name="ce11" office:value-type="string" calcext:value-type="string">
            <text:p>第４弾ブースターパック</text:p>
          </table:table-cell>
          <table:table-cell table:style-name="ce11" table:formula="of:=VLOOKUP([.H365];[$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6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5];[$種類番号.$A$1:$種類番号.$B$4];2;0)" office:value-type="float" office:value="3" calcext:value-type="float">
            <text:p>3</text:p>
          </table:table-cell>
          <table:table-cell table:style-name="ce11" office:value-type="string" calcext:value-type="string">
            <text:p>緑</text:p>
          </table:table-cell>
          <table:table-cell table:style-name="ce11" table:formula="of:=VLOOKUP([.N365];[$色番号.$A$1:$色番号.$B$10];2;0)" office:value-type="float" office:value="4" calcext:value-type="float">
            <text:p>4</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36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65];[$特性番号.$A$1:$特性番号.$B$8];2;0);0)" office:value-type="float" office:value="0" calcext:value-type="float">
            <text:p>0</text:p>
          </table:table-cell>
          <table:table-cell table:style-name="ce11"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5];[$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5.png</text:p>
          </table:table-cell>
          <table:table-cell table:style-name="ce11" table:formula="of:=CONCATENATE([$JSON.$A$1];[.$C365];[$JSON.$B$1];[.$E365];[$JSON.$C$1];[.F365];[$JSON.$D$1];[.$G365];[$JSON.$E$1];IF(ISNA([.$T365]);&quot;null&quot;;&quot;&quot;&quot;&quot;&amp;[.$T365]&amp;&quot;&quot;&quot;&quot;);[$JSON.$F$1];[.$V365];[$JSON.$G$1];IF(ISNA([.$X365]);&quot;null&quot;;&quot;&quot;&quot;&quot;&amp;[.$X365]&amp;&quot;&quot;&quot;&quot;);[$JSON.$H$1];[.$AA365];[$JSON.$I$1];[.$I365];[$JSON.$J$1];[.K365];[$JSON.$K$1];[.$M365];[$JSON.$L$1];[.$P365];[$JSON.$M$1];[.$O365];[$JSON.$N$1];[.$S365];[$JSON.$O$1];[.$U365];[$JSON.$P$1];IF(ISNA([.$W365]);&quot;null&quot;;[.$W365]);[$JSON.$Q$1];[.$Y365];[$JSON.$R$1];IF([.$Z365];&quot;true&quot;;&quot;false&quot;);[$JSON.$S$1];[.$A365];[$JSON.$T$1];[.$B365];[$JSON.$U$1])" office:value-type="string" office:string-value="{&quot;id&quot;:&quot;4-55&quot;,&quot;name&quot;:&quot;デュエル&quot;,&quot;displayName&quot;:&quot;デュエル&quot;,&quot;kana&quot;:&quot;でゅえる&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rarity&quot;:1,&quot;type&quot;:3,&quot;level&quot;:5,&quot;color&quot;:4,&quot;term&quot;:0,&quot;trait&quot;:0,&quot;power&quot;:null,&quot;legacy&quot;:1,&quot;anyNumCopies&quot;:false,&quot;orderTable&quot;:364,&quot;orderDeck&quot;:415}," calcext:value-type="string">
            <text:p>{"id":"4-55","name":"デュエル","displayName":"デュエル","kana":"でゅえる","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rarity":1,"type":3,"level":5,"color":4,"term":0,"trait":0,"power":null,"legacy":1,"anyNumCopies":false,"orderTable":364,"orderDeck":415},</text:p>
          </table:table-cell>
          <table:table-cell table:number-columns-repeated="16356"/>
        </table:table-row>
        <table:table-row table:style-name="ro2">
          <table:table-cell table:style-name="ce11" office:value-type="float" office:value="365" calcext:value-type="float">
            <text:p>365</text:p>
          </table:table-cell>
          <table:table-cell table:style-name="ce11" office:value-type="float" office:value="393" calcext:value-type="float">
            <text:p>393</text:p>
          </table:table-cell>
          <table:table-cell table:style-name="ce21" office:value-type="string" calcext:value-type="string">
            <text:p>4-56</text:p>
          </table:table-cell>
          <table:table-cell table:style-name="ce21" office:value-type="float" office:value="56" calcext:value-type="float">
            <text:p>56</text:p>
          </table:table-cell>
          <table:table-cell table:style-name="ce11" office:value-type="string" calcext:value-type="string">
            <text:p>サーベイング</text:p>
          </table:table-cell>
          <table:table-cell table:style-name="ce11" table:formula="of:=[.E366]" office:value-type="string" office:string-value="サーベイング" calcext:value-type="string">
            <text:p>サーベイング</text:p>
          </table:table-cell>
          <table:table-cell table:style-name="ce11" office:value-type="string" calcext:value-type="string">
            <text:p>さーべいんぐ</text:p>
          </table:table-cell>
          <table:table-cell table:style-name="ce11" office:value-type="string" calcext:value-type="string">
            <text:p>第４弾ブースターパック</text:p>
          </table:table-cell>
          <table:table-cell table:style-name="ce11" table:formula="of:=VLOOKUP([.H366];[$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66];[$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6];[$種類番号.$A$1:$種類番号.$B$4];2;0)" office:value-type="float" office:value="3" calcext:value-type="float">
            <text:p>3</text:p>
          </table:table-cell>
          <table:table-cell table:style-name="ce11" office:value-type="string" calcext:value-type="string">
            <text:p>緑</text:p>
          </table:table-cell>
          <table:table-cell table:style-name="ce11" table:formula="of:=VLOOKUP([.N366];[$色番号.$A$1:$色番号.$B$10];2;0)" office:value-type="float" office:value="4" calcext:value-type="float">
            <text:p>4</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66];[$特性番号.$A$1:$特性番号.$B$8];2;0);0)" office:value-type="float" office:value="0" calcext:value-type="float">
            <text:p>0</text:p>
          </table:table-cell>
          <table:table-cell table:style-name="ce11"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6];[$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6.png</text:p>
          </table:table-cell>
          <table:table-cell table:style-name="ce11" table:formula="of:=CONCATENATE([$JSON.$A$1];[.$C366];[$JSON.$B$1];[.$E366];[$JSON.$C$1];[.F366];[$JSON.$D$1];[.$G366];[$JSON.$E$1];IF(ISNA([.$T366]);&quot;null&quot;;&quot;&quot;&quot;&quot;&amp;[.$T366]&amp;&quot;&quot;&quot;&quot;);[$JSON.$F$1];[.$V366];[$JSON.$G$1];IF(ISNA([.$X366]);&quot;null&quot;;&quot;&quot;&quot;&quot;&amp;[.$X366]&amp;&quot;&quot;&quot;&quot;);[$JSON.$H$1];[.$AA366];[$JSON.$I$1];[.$I366];[$JSON.$J$1];[.K366];[$JSON.$K$1];[.$M366];[$JSON.$L$1];[.$P366];[$JSON.$M$1];[.$O366];[$JSON.$N$1];[.$S366];[$JSON.$O$1];[.$U366];[$JSON.$P$1];IF(ISNA([.$W366]);&quot;null&quot;;[.$W366]);[$JSON.$Q$1];[.$Y366];[$JSON.$R$1];IF([.$Z366];&quot;true&quot;;&quot;false&quot;);[$JSON.$S$1];[.$A366];[$JSON.$T$1];[.$B366];[$JSON.$U$1])" office:value-type="string" office:string-value="{&quot;id&quot;:&quot;4-56&quot;,&quot;name&quot;:&quot;サーベイング&quot;,&quot;displayName&quot;:&quot;サーベイング&quot;,&quot;kana&quot;:&quot;さーべいんぐ&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rarity&quot;:1,&quot;type&quot;:3,&quot;level&quot;:3,&quot;color&quot;:4,&quot;term&quot;:0,&quot;trait&quot;:0,&quot;power&quot;:null,&quot;legacy&quot;:1,&quot;anyNumCopies&quot;:false,&quot;orderTable&quot;:365,&quot;orderDeck&quot;:393}," calcext:value-type="string">
            <text:p>{"id":"4-56","name":"サーベイング","displayName":"サーベイング","kana":"さーべいんぐ","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rarity":1,"type":3,"level":3,"color":4,"term":0,"trait":0,"power":null,"legacy":1,"anyNumCopies":false,"orderTable":365,"orderDeck":393},</text:p>
          </table:table-cell>
          <table:table-cell table:number-columns-repeated="16356"/>
        </table:table-row>
        <table:table-row table:style-name="ro2">
          <table:table-cell table:style-name="ce11" office:value-type="float" office:value="366" calcext:value-type="float">
            <text:p>366</text:p>
          </table:table-cell>
          <table:table-cell table:style-name="ce11" office:value-type="float" office:value="394" calcext:value-type="float">
            <text:p>394</text:p>
          </table:table-cell>
          <table:table-cell table:style-name="ce21" office:value-type="string" calcext:value-type="string">
            <text:p>4-57</text:p>
          </table:table-cell>
          <table:table-cell table:style-name="ce21" office:value-type="float" office:value="57" calcext:value-type="float">
            <text:p>57</text:p>
          </table:table-cell>
          <table:table-cell table:style-name="ce11" office:value-type="string" calcext:value-type="string">
            <text:p>ソレイユ</text:p>
          </table:table-cell>
          <table:table-cell table:style-name="ce11" table:formula="of:=[.E367]" office:value-type="string" office:string-value="ソレイユ" calcext:value-type="string">
            <text:p>ソレイユ</text:p>
          </table:table-cell>
          <table:table-cell table:style-name="ce11" office:value-type="string" calcext:value-type="string">
            <text:p>それいゆ</text:p>
          </table:table-cell>
          <table:table-cell table:style-name="ce11" office:value-type="string" calcext:value-type="string">
            <text:p>第４弾ブースターパック</text:p>
          </table:table-cell>
          <table:table-cell table:style-name="ce11" table:formula="of:=VLOOKUP([.H367];[$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67];[$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7];[$種類番号.$A$1:$種類番号.$B$4];2;0)" office:value-type="float" office:value="3" calcext:value-type="float">
            <text:p>3</text:p>
          </table:table-cell>
          <table:table-cell table:style-name="ce11" office:value-type="string" calcext:value-type="string">
            <text:p>黄</text:p>
          </table:table-cell>
          <table:table-cell table:style-name="ce11" table:formula="of:=VLOOKUP([.N367];[$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string" calcext:value-type="string">
            <text:p>赤魔導</text:p>
          </table:table-cell>
          <table:table-cell table:style-name="ce11" table:formula="of:=IFERROR(VLOOKUP([.$R367];[$能力語番号.$A$1:$能力語番号.$B$11];2;0);0)" office:value-type="float" office:value="48" calcext:value-type="float">
            <text:p>48</text:p>
          </table:table-cell>
          <table:table-cell table:formula="of:=NA()" office:value-type="string" office:string-value="" calcext:value-type="error">
            <text:p>#N/A</text:p>
          </table:table-cell>
          <table:table-cell table:style-name="ce11" table:formula="of:=IFERROR(VLOOKUP([.$T367];[$特性番号.$A$1:$特性番号.$B$8];2;0);0)" office:value-type="float" office:value="0" calcext:value-type="float">
            <text:p>0</text:p>
          </table:table-cell>
          <table:table-cell table:style-name="ce11"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7];[$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7.png</text:p>
          </table:table-cell>
          <table:table-cell table:style-name="ce11" table:formula="of:=CONCATENATE([$JSON.$A$1];[.$C367];[$JSON.$B$1];[.$E367];[$JSON.$C$1];[.F367];[$JSON.$D$1];[.$G367];[$JSON.$E$1];IF(ISNA([.$T367]);&quot;null&quot;;&quot;&quot;&quot;&quot;&amp;[.$T367]&amp;&quot;&quot;&quot;&quot;);[$JSON.$F$1];[.$V367];[$JSON.$G$1];IF(ISNA([.$X367]);&quot;null&quot;;&quot;&quot;&quot;&quot;&amp;[.$X367]&amp;&quot;&quot;&quot;&quot;);[$JSON.$H$1];[.$AA367];[$JSON.$I$1];[.$I367];[$JSON.$J$1];[.K367];[$JSON.$K$1];[.$M367];[$JSON.$L$1];[.$P367];[$JSON.$M$1];[.$O367];[$JSON.$N$1];[.$S367];[$JSON.$O$1];[.$U367];[$JSON.$P$1];IF(ISNA([.$W367]);&quot;null&quot;;[.$W367]);[$JSON.$Q$1];[.$Y367];[$JSON.$R$1];IF([.$Z367];&quot;true&quot;;&quot;false&quot;);[$JSON.$S$1];[.$A367];[$JSON.$T$1];[.$B367];[$JSON.$U$1])" office:value-type="string" office:string-value="{&quot;id&quot;:&quot;4-57&quot;,&quot;name&quot;:&quot;ソレイユ&quot;,&quot;displayName&quot;:&quot;ソレイユ&quot;,&quot;kana&quot;:&quot;それいゆ&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rarity&quot;:1,&quot;type&quot;:3,&quot;level&quot;:3,&quot;color&quot;:8,&quot;term&quot;:48,&quot;trait&quot;:0,&quot;power&quot;:null,&quot;legacy&quot;:2,&quot;anyNumCopies&quot;:false,&quot;orderTable&quot;:366,&quot;orderDeck&quot;:394}," calcext:value-type="string">
            <text:p>{"id":"4-57","name":"ソレイユ","displayName":"ソレイユ","kana":"それいゆ","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rarity":1,"type":3,"level":3,"color":8,"term":48,"trait":0,"power":null,"legacy":2,"anyNumCopies":false,"orderTable":366,"orderDeck":394},</text:p>
          </table:table-cell>
          <table:table-cell table:number-columns-repeated="16356"/>
        </table:table-row>
        <table:table-row table:style-name="ro2">
          <table:table-cell table:style-name="ce11" office:value-type="float" office:value="367" calcext:value-type="float">
            <text:p>367</text:p>
          </table:table-cell>
          <table:table-cell table:style-name="ce11" office:value-type="float" office:value="395" calcext:value-type="float">
            <text:p>395</text:p>
          </table:table-cell>
          <table:table-cell table:style-name="ce21" office:value-type="string" calcext:value-type="string">
            <text:p>4-58</text:p>
          </table:table-cell>
          <table:table-cell table:style-name="ce21" office:value-type="float" office:value="58" calcext:value-type="float">
            <text:p>58</text:p>
          </table:table-cell>
          <table:table-cell table:style-name="ce11" office:value-type="string" calcext:value-type="string">
            <text:p>ルーナ</text:p>
          </table:table-cell>
          <table:table-cell table:style-name="ce11" table:formula="of:=[.E368]" office:value-type="string" office:string-value="ルーナ" calcext:value-type="string">
            <text:p>ルーナ</text:p>
          </table:table-cell>
          <table:table-cell table:style-name="ce11" office:value-type="string" calcext:value-type="string">
            <text:p>るーな</text:p>
          </table:table-cell>
          <table:table-cell table:style-name="ce11" office:value-type="string" calcext:value-type="string">
            <text:p>第４弾ブースターパック</text:p>
          </table:table-cell>
          <table:table-cell table:style-name="ce11" table:formula="of:=VLOOKUP([.H368];[$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68];[$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8];[$種類番号.$A$1:$種類番号.$B$4];2;0)" office:value-type="float" office:value="3" calcext:value-type="float">
            <text:p>3</text:p>
          </table:table-cell>
          <table:table-cell table:style-name="ce11" office:value-type="string" calcext:value-type="string">
            <text:p>黄</text:p>
          </table:table-cell>
          <table:table-cell table:style-name="ce11" table:formula="of:=VLOOKUP([.N368];[$色番号.$A$1:$色番号.$B$10];2;0)" office:value-type="float" office:value="8" calcext:value-type="float">
            <text:p>8</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string" calcext:value-type="string">
            <text:p>青魔導</text:p>
          </table:table-cell>
          <table:table-cell table:style-name="ce11" table:formula="of:=IFERROR(VLOOKUP([.$R368];[$能力語番号.$A$1:$能力語番号.$B$11];2;0);0)" office:value-type="float" office:value="80" calcext:value-type="float">
            <text:p>80</text:p>
          </table:table-cell>
          <table:table-cell table:formula="of:=NA()" office:value-type="string" office:string-value="" calcext:value-type="error">
            <text:p>#N/A</text:p>
          </table:table-cell>
          <table:table-cell table:style-name="ce11" table:formula="of:=IFERROR(VLOOKUP([.$T368];[$特性番号.$A$1:$特性番号.$B$8];2;0);0)" office:value-type="float" office:value="0" calcext:value-type="float">
            <text:p>0</text:p>
          </table:table-cell>
          <table:table-cell table:style-name="ce11"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68];[$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8.png</text:p>
          </table:table-cell>
          <table:table-cell table:style-name="ce11" table:formula="of:=CONCATENATE([$JSON.$A$1];[.$C368];[$JSON.$B$1];[.$E368];[$JSON.$C$1];[.F368];[$JSON.$D$1];[.$G368];[$JSON.$E$1];IF(ISNA([.$T368]);&quot;null&quot;;&quot;&quot;&quot;&quot;&amp;[.$T368]&amp;&quot;&quot;&quot;&quot;);[$JSON.$F$1];[.$V368];[$JSON.$G$1];IF(ISNA([.$X368]);&quot;null&quot;;&quot;&quot;&quot;&quot;&amp;[.$X368]&amp;&quot;&quot;&quot;&quot;);[$JSON.$H$1];[.$AA368];[$JSON.$I$1];[.$I368];[$JSON.$J$1];[.K368];[$JSON.$K$1];[.$M368];[$JSON.$L$1];[.$P368];[$JSON.$M$1];[.$O368];[$JSON.$N$1];[.$S368];[$JSON.$O$1];[.$U368];[$JSON.$P$1];IF(ISNA([.$W368]);&quot;null&quot;;[.$W368]);[$JSON.$Q$1];[.$Y368];[$JSON.$R$1];IF([.$Z368];&quot;true&quot;;&quot;false&quot;);[$JSON.$S$1];[.$A368];[$JSON.$T$1];[.$B368];[$JSON.$U$1])" office:value-type="string" office:string-value="{&quot;id&quot;:&quot;4-58&quot;,&quot;name&quot;:&quot;ルーナ&quot;,&quot;displayName&quot;:&quot;ルーナ&quot;,&quot;kana&quot;:&quot;るーな&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rarity&quot;:1,&quot;type&quot;:3,&quot;level&quot;:3,&quot;color&quot;:8,&quot;term&quot;:80,&quot;trait&quot;:0,&quot;power&quot;:null,&quot;legacy&quot;:2,&quot;anyNumCopies&quot;:false,&quot;orderTable&quot;:367,&quot;orderDeck&quot;:395}," calcext:value-type="string">
            <text:p>{"id":"4-58","name":"ルーナ","displayName":"ルーナ","kana":"るーな","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rarity":1,"type":3,"level":3,"color":8,"term":80,"trait":0,"power":null,"legacy":2,"anyNumCopies":false,"orderTable":367,"orderDeck":395},</text:p>
          </table:table-cell>
          <table:table-cell table:number-columns-repeated="16356"/>
        </table:table-row>
        <table:table-row table:style-name="ro2">
          <table:table-cell table:style-name="ce11" office:value-type="float" office:value="368" calcext:value-type="float">
            <text:p>368</text:p>
          </table:table-cell>
          <table:table-cell table:style-name="ce11" office:value-type="float" office:value="420" calcext:value-type="float">
            <text:p>420</text:p>
          </table:table-cell>
          <table:table-cell table:style-name="ce21" office:value-type="string" calcext:value-type="string">
            <text:p>4-59</text:p>
          </table:table-cell>
          <table:table-cell table:style-name="ce21" office:value-type="float" office:value="59" calcext:value-type="float">
            <text:p>59</text:p>
          </table:table-cell>
          <table:table-cell table:style-name="ce11" office:value-type="string" calcext:value-type="string">
            <text:p>リユニオン</text:p>
          </table:table-cell>
          <table:table-cell table:style-name="ce11" table:formula="of:=[.E369]" office:value-type="string" office:string-value="リユニオン" calcext:value-type="string">
            <text:p>リユニオン</text:p>
          </table:table-cell>
          <table:table-cell table:style-name="ce11" office:value-type="string" calcext:value-type="string">
            <text:p>りゆにおん</text:p>
          </table:table-cell>
          <table:table-cell table:style-name="ce11" office:value-type="string" calcext:value-type="string">
            <text:p>第４弾ブースターパック</text:p>
          </table:table-cell>
          <table:table-cell table:style-name="ce11" table:formula="of:=VLOOKUP([.H369];[$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69];[$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69];[$種類番号.$A$1:$種類番号.$B$4];2;0)" office:value-type="float" office:value="3" calcext:value-type="float">
            <text:p>3</text:p>
          </table:table-cell>
          <table:table-cell table:style-name="ce11" office:value-type="string" calcext:value-type="string">
            <text:p>紫</text:p>
          </table:table-cell>
          <table:table-cell table:style-name="ce11" table:formula="of:=VLOOKUP([.N369];[$色番号.$A$1:$色番号.$B$10];2;0)" office:value-type="float" office:value="16" calcext:value-type="float">
            <text:p>16</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36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69];[$特性番号.$A$1:$特性番号.$B$8];2;0);0)" office:value-type="float" office:value="0" calcext:value-type="float">
            <text:p>0</text:p>
          </table:table-cell>
          <table:table-cell table:style-name="ce11" office:value-type="string" calcext:value-type="string">
            <text:p>自分の戦場のイジン1体以上を指定して発動できる。それらのイジンすべてを手札に戻して、戻したイジン1体につきイジン召喚権+1す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6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59.png</text:p>
          </table:table-cell>
          <table:table-cell table:style-name="ce11" table:formula="of:=CONCATENATE([$JSON.$A$1];[.$C369];[$JSON.$B$1];[.$E369];[$JSON.$C$1];[.F369];[$JSON.$D$1];[.$G369];[$JSON.$E$1];IF(ISNA([.$T369]);&quot;null&quot;;&quot;&quot;&quot;&quot;&amp;[.$T369]&amp;&quot;&quot;&quot;&quot;);[$JSON.$F$1];[.$V369];[$JSON.$G$1];IF(ISNA([.$X369]);&quot;null&quot;;&quot;&quot;&quot;&quot;&amp;[.$X369]&amp;&quot;&quot;&quot;&quot;);[$JSON.$H$1];[.$AA369];[$JSON.$I$1];[.$I369];[$JSON.$J$1];[.K369];[$JSON.$K$1];[.$M369];[$JSON.$L$1];[.$P369];[$JSON.$M$1];[.$O369];[$JSON.$N$1];[.$S369];[$JSON.$O$1];[.$U369];[$JSON.$P$1];IF(ISNA([.$W369]);&quot;null&quot;;[.$W369]);[$JSON.$Q$1];[.$Y369];[$JSON.$R$1];IF([.$Z369];&quot;true&quot;;&quot;false&quot;);[$JSON.$S$1];[.$A369];[$JSON.$T$1];[.$B369];[$JSON.$U$1])" office:value-type="string" office:string-value="{&quot;id&quot;:&quot;4-59&quot;,&quot;name&quot;:&quot;リユニオン&quot;,&quot;displayName&quot;:&quot;リユニオン&quot;,&quot;kana&quot;:&quot;りゆにおん&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rarity&quot;:1,&quot;type&quot;:3,&quot;level&quot;:5,&quot;color&quot;:16,&quot;term&quot;:0,&quot;trait&quot;:0,&quot;power&quot;:null,&quot;legacy&quot;:1,&quot;anyNumCopies&quot;:false,&quot;orderTable&quot;:368,&quot;orderDeck&quot;:420}," calcext:value-type="string">
            <text:p>{"id":"4-59","name":"リユニオン","displayName":"リユニオン","kana":"りゆにおん","traitText":null,"ruleText":"自分の戦場のイジン1体以上を指定して発動できる。それらのイジンすべてを手札に戻して、戻したイジン1体につきイジン召喚権+1する。","legacyText":"魔力化","imageUrl":"https://one-draw.jp/ijinden/cardlist/004/card/04_059.png","expansion":45,"rarity":1,"type":3,"level":5,"color":16,"term":0,"trait":0,"power":null,"legacy":1,"anyNumCopies":false,"orderTable":368,"orderDeck":420},</text:p>
          </table:table-cell>
          <table:table-cell table:number-columns-repeated="16356"/>
        </table:table-row>
        <table:table-row table:style-name="ro2">
          <table:table-cell table:style-name="ce11" office:value-type="float" office:value="369" calcext:value-type="float">
            <text:p>369</text:p>
          </table:table-cell>
          <table:table-cell table:style-name="ce11" office:value-type="float" office:value="427" calcext:value-type="float">
            <text:p>427</text:p>
          </table:table-cell>
          <table:table-cell table:style-name="ce21" office:value-type="string" calcext:value-type="string">
            <text:p>4-60</text:p>
          </table:table-cell>
          <table:table-cell table:style-name="ce21" office:value-type="float" office:value="60" calcext:value-type="float">
            <text:p>60</text:p>
          </table:table-cell>
          <table:table-cell table:style-name="ce11" office:value-type="string" calcext:value-type="string">
            <text:p>ドッペルゲンガー</text:p>
          </table:table-cell>
          <table:table-cell table:style-name="ce11" table:formula="of:=[.E370]" office:value-type="string" office:string-value="ドッペルゲンガー" calcext:value-type="string">
            <text:p>ドッペルゲンガー</text:p>
          </table:table-cell>
          <table:table-cell table:style-name="ce11" office:value-type="string" calcext:value-type="string">
            <text:p>どっぺるげんがー</text:p>
          </table:table-cell>
          <table:table-cell table:style-name="ce11" office:value-type="string" calcext:value-type="string">
            <text:p>第４弾ブースターパック</text:p>
          </table:table-cell>
          <table:table-cell table:style-name="ce11" table:formula="of:=VLOOKUP([.H370];[$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70];[$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0];[$種類番号.$A$1:$種類番号.$B$4];2;0)" office:value-type="float" office:value="3" calcext:value-type="float">
            <text:p>3</text:p>
          </table:table-cell>
          <table:table-cell table:style-name="ce11" office:value-type="string" calcext:value-type="string">
            <text:p>紫</text:p>
          </table:table-cell>
          <table:table-cell table:style-name="ce11" table:formula="of:=VLOOKUP([.N370];[$色番号.$A$1:$色番号.$B$10];2;0)" office:value-type="float" office:value="16" calcext:value-type="float">
            <text:p>16</text:p>
          </table:table-cell>
          <table:table-cell table:style-name="ce11" office:value-type="float" office:value="7" calcext:value-type="float">
            <text:p>7</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37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70];[$特性番号.$A$1:$特性番号.$B$8];2;0);0)" office:value-type="float" office:value="0" calcext:value-type="float">
            <text:p>0</text:p>
          </table:table-cell>
          <table:table-cell table:style-name="ce11" office:value-type="string" calcext:value-type="string">
            <text:p>相手の手札を見て、相手の手札と戦場と墓地で、同じカード名を持つ、マリョクでないカードすべてを墓地に置く。</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0];[$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0.png</text:p>
          </table:table-cell>
          <table:table-cell table:style-name="ce11" table:formula="of:=CONCATENATE([$JSON.$A$1];[.$C370];[$JSON.$B$1];[.$E370];[$JSON.$C$1];[.F370];[$JSON.$D$1];[.$G370];[$JSON.$E$1];IF(ISNA([.$T370]);&quot;null&quot;;&quot;&quot;&quot;&quot;&amp;[.$T370]&amp;&quot;&quot;&quot;&quot;);[$JSON.$F$1];[.$V370];[$JSON.$G$1];IF(ISNA([.$X370]);&quot;null&quot;;&quot;&quot;&quot;&quot;&amp;[.$X370]&amp;&quot;&quot;&quot;&quot;);[$JSON.$H$1];[.$AA370];[$JSON.$I$1];[.$I370];[$JSON.$J$1];[.K370];[$JSON.$K$1];[.$M370];[$JSON.$L$1];[.$P370];[$JSON.$M$1];[.$O370];[$JSON.$N$1];[.$S370];[$JSON.$O$1];[.$U370];[$JSON.$P$1];IF(ISNA([.$W370]);&quot;null&quot;;[.$W370]);[$JSON.$Q$1];[.$Y370];[$JSON.$R$1];IF([.$Z370];&quot;true&quot;;&quot;false&quot;);[$JSON.$S$1];[.$A370];[$JSON.$T$1];[.$B370];[$JSON.$U$1])" office:value-type="string" office:string-value="{&quot;id&quot;:&quot;4-60&quot;,&quot;name&quot;:&quot;ドッペルゲンガー&quot;,&quot;displayName&quot;:&quot;ドッペルゲンガー&quot;,&quot;kana&quot;:&quot;どっぺるげんが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rarity&quot;:1,&quot;type&quot;:3,&quot;level&quot;:7,&quot;color&quot;:16,&quot;term&quot;:0,&quot;trait&quot;:0,&quot;power&quot;:null,&quot;legacy&quot;:5,&quot;anyNumCopies&quot;:false,&quot;orderTable&quot;:369,&quot;orderDeck&quot;:427}," calcext:value-type="string">
            <text:p>{"id":"4-60","name":"ドッペルゲンガー","displayName":"ドッペルゲンガー","kana":"どっぺるげんがー","traitText":null,"ruleText":"相手の手札を見て、相手の手札と戦場と墓地で、同じカード名を持つ、マリョクでないカードすべてを墓地に置く。","legacyText":"手札に戻す","imageUrl":"https://one-draw.jp/ijinden/cardlist/004/card/04_060.png","expansion":45,"rarity":1,"type":3,"level":7,"color":16,"term":0,"trait":0,"power":null,"legacy":5,"anyNumCopies":false,"orderTable":369,"orderDeck":427},</text:p>
          </table:table-cell>
          <table:table-cell table:number-columns-repeated="16356"/>
        </table:table-row>
        <table:table-row table:style-name="ro2">
          <table:table-cell table:style-name="ce11" office:value-type="float" office:value="370" calcext:value-type="float">
            <text:p>370</text:p>
          </table:table-cell>
          <table:table-cell table:style-name="ce11" office:value-type="float" office:value="366" calcext:value-type="float">
            <text:p>366</text:p>
          </table:table-cell>
          <table:table-cell table:style-name="ce21" office:value-type="string" calcext:value-type="string">
            <text:p>4-61</text:p>
          </table:table-cell>
          <table:table-cell table:style-name="ce21" office:value-type="float" office:value="61" calcext:value-type="float">
            <text:p>61</text:p>
          </table:table-cell>
          <table:table-cell table:style-name="ce11" office:value-type="string" calcext:value-type="string">
            <text:p>ソリッドビジョンα</text:p>
          </table:table-cell>
          <table:table-cell table:style-name="ce11" table:formula="of:=[.E371]" office:value-type="string" office:string-value="ソリッドビジョンα" calcext:value-type="string">
            <text:p>ソリッドビジョンα</text:p>
          </table:table-cell>
          <table:table-cell table:style-name="ce11" office:value-type="string" calcext:value-type="string">
            <text:p>そりっどびじょんあるふぁ</text:p>
          </table:table-cell>
          <table:table-cell table:style-name="ce11" office:value-type="string" calcext:value-type="string">
            <text:p>第４弾ブースターパック</text:p>
          </table:table-cell>
          <table:table-cell table:style-name="ce11" table:formula="of:=VLOOKUP([.H371];[$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71];[$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1];[$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1];[$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赤魔導</text:p>
          </table:table-cell>
          <table:table-cell table:style-name="ce11" table:formula="of:=IFERROR(VLOOKUP([.$R371];[$能力語番号.$A$1:$能力語番号.$B$11];2;0);0)" office:value-type="float" office:value="48" calcext:value-type="float">
            <text:p>48</text:p>
          </table:table-cell>
          <table:table-cell table:formula="of:=NA()" office:value-type="string" office:string-value="" calcext:value-type="error">
            <text:p>#N/A</text:p>
          </table:table-cell>
          <table:table-cell table:style-name="ce11" table:formula="of:=IFERROR(VLOOKUP([.$T371];[$特性番号.$A$1:$特性番号.$B$8];2;0);0)" office:value-type="float" office:value="0" calcext:value-type="float">
            <text:p>0</text:p>
          </table:table-cell>
          <table:table-cell table:style-name="ce11" office:value-type="string" calcext:value-type="string">
            <text:p>1ドローする。¶赤魔導 - 赤のカードが自分の戦場か自分の魔力ゾーンにあるなら「戦場のハイケイ1つを破壊する」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1];[$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1.png</text:p>
          </table:table-cell>
          <table:table-cell table:style-name="ce11" table:formula="of:=CONCATENATE([$JSON.$A$1];[.$C371];[$JSON.$B$1];[.$E371];[$JSON.$C$1];[.F371];[$JSON.$D$1];[.$G371];[$JSON.$E$1];IF(ISNA([.$T371]);&quot;null&quot;;&quot;&quot;&quot;&quot;&amp;[.$T371]&amp;&quot;&quot;&quot;&quot;);[$JSON.$F$1];[.$V371];[$JSON.$G$1];IF(ISNA([.$X371]);&quot;null&quot;;&quot;&quot;&quot;&quot;&amp;[.$X371]&amp;&quot;&quot;&quot;&quot;);[$JSON.$H$1];[.$AA371];[$JSON.$I$1];[.$I371];[$JSON.$J$1];[.K371];[$JSON.$K$1];[.$M371];[$JSON.$L$1];[.$P371];[$JSON.$M$1];[.$O371];[$JSON.$N$1];[.$S371];[$JSON.$O$1];[.$U371];[$JSON.$P$1];IF(ISNA([.$W371]);&quot;null&quot;;[.$W371]);[$JSON.$Q$1];[.$Y371];[$JSON.$R$1];IF([.$Z371];&quot;true&quot;;&quot;false&quot;);[$JSON.$S$1];[.$A371];[$JSON.$T$1];[.$B371];[$JSON.$U$1])" office:value-type="string" office:string-value="{&quot;id&quot;:&quot;4-61&quot;,&quot;name&quot;:&quot;ソリッドビジョンα&quot;,&quot;displayName&quot;:&quot;ソリッドビジョンα&quot;,&quot;kana&quot;:&quot;そりっどびじょんあるふぁ&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rarity&quot;:1,&quot;type&quot;:3,&quot;level&quot;:1,&quot;color&quot;:64,&quot;term&quot;:48,&quot;trait&quot;:0,&quot;power&quot;:null,&quot;legacy&quot;:2,&quot;anyNumCopies&quot;:false,&quot;orderTable&quot;:370,&quot;orderDeck&quot;:366}," calcext:value-type="string">
            <text:p>{"id":"4-61","name":"ソリッドビジョンα","displayName":"ソリッドビジョンα","kana":"そりっどびじょんあるふぁ","traitText":null,"ruleText":"1ドローする。¶赤魔導 - 赤のカードが自分の戦場か自分の魔力ゾーンにあるなら「戦場のハイケイ1つを破壊する」を発揮してもよい。","legacyText":"冥府発動","imageUrl":"https://one-draw.jp/ijinden/cardlist/004/card/04_061.png","expansion":45,"rarity":1,"type":3,"level":1,"color":64,"term":48,"trait":0,"power":null,"legacy":2,"anyNumCopies":false,"orderTable":370,"orderDeck":366},</text:p>
          </table:table-cell>
          <table:table-cell table:number-columns-repeated="16356"/>
        </table:table-row>
        <table:table-row table:style-name="ro2">
          <table:table-cell table:style-name="ce11" office:value-type="float" office:value="371" calcext:value-type="float">
            <text:p>371</text:p>
          </table:table-cell>
          <table:table-cell table:style-name="ce11" office:value-type="float" office:value="367" calcext:value-type="float">
            <text:p>367</text:p>
          </table:table-cell>
          <table:table-cell table:style-name="ce21" office:value-type="string" calcext:value-type="string">
            <text:p>4-62</text:p>
          </table:table-cell>
          <table:table-cell table:style-name="ce21" office:value-type="float" office:value="62" calcext:value-type="float">
            <text:p>62</text:p>
          </table:table-cell>
          <table:table-cell table:style-name="ce11" office:value-type="string" calcext:value-type="string">
            <text:p>ソリッドビジョンδ</text:p>
          </table:table-cell>
          <table:table-cell table:style-name="ce11" table:formula="of:=[.E372]" office:value-type="string" office:string-value="ソリッドビジョンδ" calcext:value-type="string">
            <text:p>ソリッドビジョンδ</text:p>
          </table:table-cell>
          <table:table-cell table:style-name="ce11" office:value-type="string" calcext:value-type="string">
            <text:p>そりっどびじょんでるた</text:p>
          </table:table-cell>
          <table:table-cell table:style-name="ce11" office:value-type="string" calcext:value-type="string">
            <text:p>第４弾ブースターパック</text:p>
          </table:table-cell>
          <table:table-cell table:style-name="ce11" table:formula="of:=VLOOKUP([.H372];[$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72];[$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2];[$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2];[$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青魔導</text:p>
          </table:table-cell>
          <table:table-cell table:style-name="ce11" table:formula="of:=IFERROR(VLOOKUP([.$R372];[$能力語番号.$A$1:$能力語番号.$B$11];2;0);0)" office:value-type="float" office:value="80" calcext:value-type="float">
            <text:p>80</text:p>
          </table:table-cell>
          <table:table-cell table:formula="of:=NA()" office:value-type="string" office:string-value="" calcext:value-type="error">
            <text:p>#N/A</text:p>
          </table:table-cell>
          <table:table-cell table:style-name="ce11" table:formula="of:=IFERROR(VLOOKUP([.$T372];[$特性番号.$A$1:$特性番号.$B$8];2;0);0)" office:value-type="float" office:value="0" calcext:value-type="float">
            <text:p>0</text:p>
          </table:table-cell>
          <table:table-cell table:style-name="ce11"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2];[$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2.png</text:p>
          </table:table-cell>
          <table:table-cell table:style-name="ce11" table:formula="of:=CONCATENATE([$JSON.$A$1];[.$C372];[$JSON.$B$1];[.$E372];[$JSON.$C$1];[.F372];[$JSON.$D$1];[.$G372];[$JSON.$E$1];IF(ISNA([.$T372]);&quot;null&quot;;&quot;&quot;&quot;&quot;&amp;[.$T372]&amp;&quot;&quot;&quot;&quot;);[$JSON.$F$1];[.$V372];[$JSON.$G$1];IF(ISNA([.$X372]);&quot;null&quot;;&quot;&quot;&quot;&quot;&amp;[.$X372]&amp;&quot;&quot;&quot;&quot;);[$JSON.$H$1];[.$AA372];[$JSON.$I$1];[.$I372];[$JSON.$J$1];[.K372];[$JSON.$K$1];[.$M372];[$JSON.$L$1];[.$P372];[$JSON.$M$1];[.$O372];[$JSON.$N$1];[.$S372];[$JSON.$O$1];[.$U372];[$JSON.$P$1];IF(ISNA([.$W372]);&quot;null&quot;;[.$W372]);[$JSON.$Q$1];[.$Y372];[$JSON.$R$1];IF([.$Z372];&quot;true&quot;;&quot;false&quot;);[$JSON.$S$1];[.$A372];[$JSON.$T$1];[.$B372];[$JSON.$U$1])" office:value-type="string" office:string-value="{&quot;id&quot;:&quot;4-62&quot;,&quot;name&quot;:&quot;ソリッドビジョンδ&quot;,&quot;displayName&quot;:&quot;ソリッドビジョンδ&quot;,&quot;kana&quot;:&quot;そりっどびじょんでるた&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rarity&quot;:1,&quot;type&quot;:3,&quot;level&quot;:1,&quot;color&quot;:64,&quot;term&quot;:80,&quot;trait&quot;:0,&quot;power&quot;:null,&quot;legacy&quot;:2,&quot;anyNumCopies&quot;:false,&quot;orderTable&quot;:371,&quot;orderDeck&quot;:367}," calcext:value-type="string">
            <text:p>{"id":"4-62","name":"ソリッドビジョンδ","displayName":"ソリッドビジョンδ","kana":"そりっどびじょんでるた","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rarity":1,"type":3,"level":1,"color":64,"term":80,"trait":0,"power":null,"legacy":2,"anyNumCopies":false,"orderTable":371,"orderDeck":367},</text:p>
          </table:table-cell>
          <table:table-cell table:number-columns-repeated="16356"/>
        </table:table-row>
        <table:table-row table:style-name="ro2">
          <table:table-cell table:style-name="ce11" office:value-type="float" office:value="372" calcext:value-type="float">
            <text:p>372</text:p>
          </table:table-cell>
          <table:table-cell table:style-name="ce11" office:value-type="float" office:value="368" calcext:value-type="float">
            <text:p>368</text:p>
          </table:table-cell>
          <table:table-cell table:style-name="ce21" office:value-type="string" calcext:value-type="string">
            <text:p>4-63</text:p>
          </table:table-cell>
          <table:table-cell table:style-name="ce21" office:value-type="float" office:value="63" calcext:value-type="float">
            <text:p>63</text:p>
          </table:table-cell>
          <table:table-cell table:style-name="ce11" office:value-type="string" calcext:value-type="string">
            <text:p>ソリッドビジョンΩ</text:p>
          </table:table-cell>
          <table:table-cell table:style-name="ce11" table:formula="of:=[.E373]" office:value-type="string" office:string-value="ソリッドビジョンΩ" calcext:value-type="string">
            <text:p>ソリッドビジョンΩ</text:p>
          </table:table-cell>
          <table:table-cell table:style-name="ce11" office:value-type="string" calcext:value-type="string">
            <text:p>そりっどびじょんおめが</text:p>
          </table:table-cell>
          <table:table-cell table:style-name="ce11" office:value-type="string" calcext:value-type="string">
            <text:p>第４弾ブースターパック</text:p>
          </table:table-cell>
          <table:table-cell table:style-name="ce11" table:formula="of:=VLOOKUP([.H373];[$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73];[$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3];[$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3];[$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緑魔導</text:p>
          </table:table-cell>
          <table:table-cell table:style-name="ce11" table:formula="of:=IFERROR(VLOOKUP([.$R373];[$能力語番号.$A$1:$能力語番号.$B$11];2;0);0)" office:value-type="float" office:value="144" calcext:value-type="float">
            <text:p>144</text:p>
          </table:table-cell>
          <table:table-cell table:formula="of:=NA()" office:value-type="string" office:string-value="" calcext:value-type="error">
            <text:p>#N/A</text:p>
          </table:table-cell>
          <table:table-cell table:style-name="ce11" table:formula="of:=IFERROR(VLOOKUP([.$T373];[$特性番号.$A$1:$特性番号.$B$8];2;0);0)" office:value-type="float" office:value="0" calcext:value-type="float">
            <text:p>0</text:p>
          </table:table-cell>
          <table:table-cell table:style-name="ce11" office:value-type="string" calcext:value-type="string">
            <text:p>1ドローする。¶緑魔導 - 緑のカードが自分の戦場か自分の魔力ゾーンにあるなら「これを裏にして魔力ゾーンに置く」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3];[$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3.png</text:p>
          </table:table-cell>
          <table:table-cell table:style-name="ce11" table:formula="of:=CONCATENATE([$JSON.$A$1];[.$C373];[$JSON.$B$1];[.$E373];[$JSON.$C$1];[.F373];[$JSON.$D$1];[.$G373];[$JSON.$E$1];IF(ISNA([.$T373]);&quot;null&quot;;&quot;&quot;&quot;&quot;&amp;[.$T373]&amp;&quot;&quot;&quot;&quot;);[$JSON.$F$1];[.$V373];[$JSON.$G$1];IF(ISNA([.$X373]);&quot;null&quot;;&quot;&quot;&quot;&quot;&amp;[.$X373]&amp;&quot;&quot;&quot;&quot;);[$JSON.$H$1];[.$AA373];[$JSON.$I$1];[.$I373];[$JSON.$J$1];[.K373];[$JSON.$K$1];[.$M373];[$JSON.$L$1];[.$P373];[$JSON.$M$1];[.$O373];[$JSON.$N$1];[.$S373];[$JSON.$O$1];[.$U373];[$JSON.$P$1];IF(ISNA([.$W373]);&quot;null&quot;;[.$W373]);[$JSON.$Q$1];[.$Y373];[$JSON.$R$1];IF([.$Z373];&quot;true&quot;;&quot;false&quot;);[$JSON.$S$1];[.$A373];[$JSON.$T$1];[.$B373];[$JSON.$U$1])" office:value-type="string" office:string-value="{&quot;id&quot;:&quot;4-63&quot;,&quot;name&quot;:&quot;ソリッドビジョンΩ&quot;,&quot;displayName&quot;:&quot;ソリッドビジョンΩ&quot;,&quot;kana&quot;:&quot;そりっどびじょんおめが&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rarity&quot;:1,&quot;type&quot;:3,&quot;level&quot;:1,&quot;color&quot;:64,&quot;term&quot;:144,&quot;trait&quot;:0,&quot;power&quot;:null,&quot;legacy&quot;:2,&quot;anyNumCopies&quot;:false,&quot;orderTable&quot;:372,&quot;orderDeck&quot;:368}," calcext:value-type="string">
            <text:p>{"id":"4-63","name":"ソリッドビジョンΩ","displayName":"ソリッドビジョンΩ","kana":"そりっどびじょんおめが","traitText":null,"ruleText":"1ドローする。¶緑魔導 - 緑のカードが自分の戦場か自分の魔力ゾーンにあるなら「これを裏にして魔力ゾーンに置く」を発揮してもよい。","legacyText":"冥府発動","imageUrl":"https://one-draw.jp/ijinden/cardlist/004/card/04_063.png","expansion":45,"rarity":1,"type":3,"level":1,"color":64,"term":144,"trait":0,"power":null,"legacy":2,"anyNumCopies":false,"orderTable":372,"orderDeck":368},</text:p>
          </table:table-cell>
          <table:table-cell table:number-columns-repeated="16356"/>
        </table:table-row>
        <table:table-row table:style-name="ro2">
          <table:table-cell table:style-name="ce11" office:value-type="float" office:value="373" calcext:value-type="float">
            <text:p>373</text:p>
          </table:table-cell>
          <table:table-cell table:style-name="ce11" office:value-type="float" office:value="369" calcext:value-type="float">
            <text:p>369</text:p>
          </table:table-cell>
          <table:table-cell table:style-name="ce21" office:value-type="string" calcext:value-type="string">
            <text:p>4-64</text:p>
          </table:table-cell>
          <table:table-cell table:style-name="ce21" office:value-type="float" office:value="64" calcext:value-type="float">
            <text:p>64</text:p>
          </table:table-cell>
          <table:table-cell table:style-name="ce11" office:value-type="string" calcext:value-type="string">
            <text:p>ソリッドビジョンβ</text:p>
          </table:table-cell>
          <table:table-cell table:style-name="ce11" table:formula="of:=[.E374]" office:value-type="string" office:string-value="ソリッドビジョンβ" calcext:value-type="string">
            <text:p>ソリッドビジョンβ</text:p>
          </table:table-cell>
          <table:table-cell table:style-name="ce11" office:value-type="string" calcext:value-type="string">
            <text:p>そりっどびじょんべーた</text:p>
          </table:table-cell>
          <table:table-cell table:style-name="ce11" office:value-type="string" calcext:value-type="string">
            <text:p>第４弾ブースターパック</text:p>
          </table:table-cell>
          <table:table-cell table:style-name="ce11" table:formula="of:=VLOOKUP([.H374];[$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74];[$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4];[$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4];[$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黄魔導</text:p>
          </table:table-cell>
          <table:table-cell table:style-name="ce11" table:formula="of:=IFERROR(VLOOKUP([.$R374];[$能力語番号.$A$1:$能力語番号.$B$11];2;0);0)" office:value-type="float" office:value="272" calcext:value-type="float">
            <text:p>272</text:p>
          </table:table-cell>
          <table:table-cell table:formula="of:=NA()" office:value-type="string" office:string-value="" calcext:value-type="error">
            <text:p>#N/A</text:p>
          </table:table-cell>
          <table:table-cell table:style-name="ce11" table:formula="of:=IFERROR(VLOOKUP([.$T374];[$特性番号.$A$1:$特性番号.$B$8];2;0);0)" office:value-type="float" office:value="0" calcext:value-type="float">
            <text:p>0</text:p>
          </table:table-cell>
          <table:table-cell table:style-name="ce11"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4];[$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4.png</text:p>
          </table:table-cell>
          <table:table-cell table:style-name="ce11" table:formula="of:=CONCATENATE([$JSON.$A$1];[.$C374];[$JSON.$B$1];[.$E374];[$JSON.$C$1];[.F374];[$JSON.$D$1];[.$G374];[$JSON.$E$1];IF(ISNA([.$T374]);&quot;null&quot;;&quot;&quot;&quot;&quot;&amp;[.$T374]&amp;&quot;&quot;&quot;&quot;);[$JSON.$F$1];[.$V374];[$JSON.$G$1];IF(ISNA([.$X374]);&quot;null&quot;;&quot;&quot;&quot;&quot;&amp;[.$X374]&amp;&quot;&quot;&quot;&quot;);[$JSON.$H$1];[.$AA374];[$JSON.$I$1];[.$I374];[$JSON.$J$1];[.K374];[$JSON.$K$1];[.$M374];[$JSON.$L$1];[.$P374];[$JSON.$M$1];[.$O374];[$JSON.$N$1];[.$S374];[$JSON.$O$1];[.$U374];[$JSON.$P$1];IF(ISNA([.$W374]);&quot;null&quot;;[.$W374]);[$JSON.$Q$1];[.$Y374];[$JSON.$R$1];IF([.$Z374];&quot;true&quot;;&quot;false&quot;);[$JSON.$S$1];[.$A374];[$JSON.$T$1];[.$B374];[$JSON.$U$1])" office:value-type="string" office:string-value="{&quot;id&quot;:&quot;4-64&quot;,&quot;name&quot;:&quot;ソリッドビジョンβ&quot;,&quot;displayName&quot;:&quot;ソリッドビジョンβ&quot;,&quot;kana&quot;:&quot;そりっどびじょんべーた&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rarity&quot;:1,&quot;type&quot;:3,&quot;level&quot;:1,&quot;color&quot;:64,&quot;term&quot;:272,&quot;trait&quot;:0,&quot;power&quot;:null,&quot;legacy&quot;:2,&quot;anyNumCopies&quot;:false,&quot;orderTable&quot;:373,&quot;orderDeck&quot;:369}," calcext:value-type="string">
            <text:p>{"id":"4-64","name":"ソリッドビジョンβ","displayName":"ソリッドビジョンβ","kana":"そりっどびじょんべーた","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rarity":1,"type":3,"level":1,"color":64,"term":272,"trait":0,"power":null,"legacy":2,"anyNumCopies":false,"orderTable":373,"orderDeck":369},</text:p>
          </table:table-cell>
          <table:table-cell table:number-columns-repeated="16356"/>
        </table:table-row>
        <table:table-row table:style-name="ro2">
          <table:table-cell table:style-name="ce11" office:value-type="float" office:value="374" calcext:value-type="float">
            <text:p>374</text:p>
          </table:table-cell>
          <table:table-cell table:style-name="ce11" office:value-type="float" office:value="370" calcext:value-type="float">
            <text:p>370</text:p>
          </table:table-cell>
          <table:table-cell table:style-name="ce21" office:value-type="string" calcext:value-type="string">
            <text:p>4-65</text:p>
          </table:table-cell>
          <table:table-cell table:style-name="ce21" office:value-type="float" office:value="65" calcext:value-type="float">
            <text:p>65</text:p>
          </table:table-cell>
          <table:table-cell table:style-name="ce11" office:value-type="string" calcext:value-type="string">
            <text:p>ソリッドビジョンγ</text:p>
          </table:table-cell>
          <table:table-cell table:style-name="ce11" table:formula="of:=[.E375]" office:value-type="string" office:string-value="ソリッドビジョンγ" calcext:value-type="string">
            <text:p>ソリッドビジョンγ</text:p>
          </table:table-cell>
          <table:table-cell table:style-name="ce11" office:value-type="string" calcext:value-type="string">
            <text:p>そりっどびじょんがんま</text:p>
          </table:table-cell>
          <table:table-cell table:style-name="ce11" office:value-type="string" calcext:value-type="string">
            <text:p>第４弾ブースターパック</text:p>
          </table:table-cell>
          <table:table-cell table:style-name="ce11" table:formula="of:=VLOOKUP([.H375];[$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75];[$レアリティ番号.$A$1:$レアリティ番号.$B$4];2;0)" office:value-type="float" office:value="1" calcext:value-type="float">
            <text:p>1</text:p>
          </table:table-cell>
          <table:table-cell table:style-name="ce11" office:value-type="string" calcext:value-type="string">
            <text:p>マホウ</text:p>
          </table:table-cell>
          <table:table-cell table:style-name="ce11" table:formula="of:=VLOOKUP([.L375];[$種類番号.$A$1:$種類番号.$B$4];2;0)" office:value-type="float" office:value="3" calcext:value-type="float">
            <text:p>3</text:p>
          </table:table-cell>
          <table:table-cell table:style-name="ce11" office:value-type="string" calcext:value-type="string">
            <text:p>無色</text:p>
          </table:table-cell>
          <table:table-cell table:style-name="ce11" table:formula="of:=VLOOKUP([.N375];[$色番号.$A$1:$色番号.$B$10];2;0)" office:value-type="float" office:value="64" calcext:value-type="float">
            <text:p>64</text:p>
          </table:table-cell>
          <table:table-cell table:number-columns-repeated="2" table:style-name="ce11" office:value-type="float" office:value="1" calcext:value-type="float">
            <text:p>1</text:p>
          </table:table-cell>
          <table:table-cell table:style-name="ce11" office:value-type="string" calcext:value-type="string">
            <text:p>紫魔導</text:p>
          </table:table-cell>
          <table:table-cell table:style-name="ce11" table:formula="of:=IFERROR(VLOOKUP([.$R375];[$能力語番号.$A$1:$能力語番号.$B$11];2;0);0)" office:value-type="float" office:value="528" calcext:value-type="float">
            <text:p>528</text:p>
          </table:table-cell>
          <table:table-cell table:formula="of:=NA()" office:value-type="string" office:string-value="" calcext:value-type="error">
            <text:p>#N/A</text:p>
          </table:table-cell>
          <table:table-cell table:style-name="ce11" table:formula="of:=IFERROR(VLOOKUP([.$T375];[$特性番号.$A$1:$特性番号.$B$8];2;0);0)" office:value-type="float" office:value="0" calcext:value-type="float">
            <text:p>0</text:p>
          </table:table-cell>
          <table:table-cell table:style-name="ce11" office:value-type="string" calcext:value-type="string">
            <text:p>1ドローする。¶紫魔導 - 紫のカードが自分の戦場か自分の魔力ゾーンにあるなら「自分の戦場のガーディアン1体を手札に戻す」を発揮してもよい。</text:p>
          </table:table-cell>
          <table:table-cell table:style-name="ce11" table:formula="of:=NA()" office:value-type="string" office:string-value="" calcext:value-type="error">
            <text:p>#N/A</text:p>
          </table:table-cell>
          <table:table-cell table:style-name="ce25" office:value-type="string" calcext:value-type="string">
            <text:p>冥府発動</text:p>
          </table:table-cell>
          <table:table-cell table:style-name="ce11" table:formula="of:=IFERROR(VLOOKUP([.$X375];[$遺業能力番号.$A$1:$遺業能力番号.$B$9];2;0);0)" office:value-type="float" office:value="2" calcext:value-type="float">
            <text:p>2</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5.png</text:p>
          </table:table-cell>
          <table:table-cell table:style-name="ce11" table:formula="of:=CONCATENATE([$JSON.$A$1];[.$C375];[$JSON.$B$1];[.$E375];[$JSON.$C$1];[.F375];[$JSON.$D$1];[.$G375];[$JSON.$E$1];IF(ISNA([.$T375]);&quot;null&quot;;&quot;&quot;&quot;&quot;&amp;[.$T375]&amp;&quot;&quot;&quot;&quot;);[$JSON.$F$1];[.$V375];[$JSON.$G$1];IF(ISNA([.$X375]);&quot;null&quot;;&quot;&quot;&quot;&quot;&amp;[.$X375]&amp;&quot;&quot;&quot;&quot;);[$JSON.$H$1];[.$AA375];[$JSON.$I$1];[.$I375];[$JSON.$J$1];[.K375];[$JSON.$K$1];[.$M375];[$JSON.$L$1];[.$P375];[$JSON.$M$1];[.$O375];[$JSON.$N$1];[.$S375];[$JSON.$O$1];[.$U375];[$JSON.$P$1];IF(ISNA([.$W375]);&quot;null&quot;;[.$W375]);[$JSON.$Q$1];[.$Y375];[$JSON.$R$1];IF([.$Z375];&quot;true&quot;;&quot;false&quot;);[$JSON.$S$1];[.$A375];[$JSON.$T$1];[.$B375];[$JSON.$U$1])" office:value-type="string" office:string-value="{&quot;id&quot;:&quot;4-65&quot;,&quot;name&quot;:&quot;ソリッドビジョンγ&quot;,&quot;displayName&quot;:&quot;ソリッドビジョンγ&quot;,&quot;kana&quot;:&quot;そりっどびじょんがんま&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rarity&quot;:1,&quot;type&quot;:3,&quot;level&quot;:1,&quot;color&quot;:64,&quot;term&quot;:528,&quot;trait&quot;:0,&quot;power&quot;:null,&quot;legacy&quot;:2,&quot;anyNumCopies&quot;:false,&quot;orderTable&quot;:374,&quot;orderDeck&quot;:370}," calcext:value-type="string">
            <text:p>{"id":"4-65","name":"ソリッドビジョンγ","displayName":"ソリッドビジョンγ","kana":"そりっどびじょんがんま","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rarity":1,"type":3,"level":1,"color":64,"term":528,"trait":0,"power":null,"legacy":2,"anyNumCopies":false,"orderTable":374,"orderDeck":370},</text:p>
          </table:table-cell>
          <table:table-cell table:number-columns-repeated="16356"/>
        </table:table-row>
        <table:table-row table:style-name="ro2">
          <table:table-cell table:style-name="ce11" office:value-type="float" office:value="375" calcext:value-type="float">
            <text:p>375</text:p>
          </table:table-cell>
          <table:table-cell table:style-name="ce11" office:value-type="float" office:value="440" calcext:value-type="float">
            <text:p>440</text:p>
          </table:table-cell>
          <table:table-cell table:style-name="ce21" office:value-type="string" calcext:value-type="string">
            <text:p>4-66</text:p>
          </table:table-cell>
          <table:table-cell table:style-name="ce21" office:value-type="float" office:value="66" calcext:value-type="float">
            <text:p>66</text:p>
          </table:table-cell>
          <table:table-cell table:style-name="ce11" office:value-type="string" calcext:value-type="string">
            <text:p>遁甲式烈火</text:p>
          </table:table-cell>
          <table:table-cell table:style-name="ce11" table:formula="of:=[.E376]" office:value-type="string" office:string-value="遁甲式烈火" calcext:value-type="string">
            <text:p>遁甲式烈火</text:p>
          </table:table-cell>
          <table:table-cell table:style-name="ce11" office:value-type="string" calcext:value-type="string">
            <text:p>とんこうしきれっか</text:p>
          </table:table-cell>
          <table:table-cell table:style-name="ce11" office:value-type="string" calcext:value-type="string">
            <text:p>第４弾ブースターパック</text:p>
          </table:table-cell>
          <table:table-cell table:style-name="ce11" table:formula="of:=VLOOKUP([.H376];[$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76];[$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76];[$種類番号.$A$1:$種類番号.$B$4];2;0)" office:value-type="float" office:value="4" calcext:value-type="float">
            <text:p>4</text:p>
          </table:table-cell>
          <table:table-cell table:style-name="ce11" office:value-type="string" calcext:value-type="string">
            <text:p>赤</text:p>
          </table:table-cell>
          <table:table-cell table:style-name="ce11" table:formula="of:=VLOOKUP([.N376];[$色番号.$A$1:$色番号.$B$10];2;0)" office:value-type="float" office:value="1" calcext:value-type="float">
            <text:p>1</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76];[$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76];[$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6.png</text:p>
          </table:table-cell>
          <table:table-cell table:style-name="ce11" table:formula="of:=CONCATENATE([$JSON.$A$1];[.$C376];[$JSON.$B$1];[.$E376];[$JSON.$C$1];[.F376];[$JSON.$D$1];[.$G376];[$JSON.$E$1];IF(ISNA([.$T376]);&quot;null&quot;;&quot;&quot;&quot;&quot;&amp;[.$T376]&amp;&quot;&quot;&quot;&quot;);[$JSON.$F$1];[.$V376];[$JSON.$G$1];IF(ISNA([.$X376]);&quot;null&quot;;&quot;&quot;&quot;&quot;&amp;[.$X376]&amp;&quot;&quot;&quot;&quot;);[$JSON.$H$1];[.$AA376];[$JSON.$I$1];[.$I376];[$JSON.$J$1];[.K376];[$JSON.$K$1];[.$M376];[$JSON.$L$1];[.$P376];[$JSON.$M$1];[.$O376];[$JSON.$N$1];[.$S376];[$JSON.$O$1];[.$U376];[$JSON.$P$1];IF(ISNA([.$W376]);&quot;null&quot;;[.$W376]);[$JSON.$Q$1];[.$Y376];[$JSON.$R$1];IF([.$Z376];&quot;true&quot;;&quot;false&quot;);[$JSON.$S$1];[.$A376];[$JSON.$T$1];[.$B376];[$JSON.$U$1])" office:value-type="string" office:string-value="{&quot;id&quot;:&quot;4-66&quot;,&quot;name&quot;:&quot;遁甲式烈火&quot;,&quot;displayName&quot;:&quot;遁甲式烈火&quot;,&quot;kana&quot;:&quot;とんこうしきれっか&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rarity&quot;:2,&quot;type&quot;:4,&quot;level&quot;:1,&quot;color&quot;:1,&quot;term&quot;:0,&quot;trait&quot;:0,&quot;power&quot;:null,&quot;legacy&quot;:9,&quot;anyNumCopies&quot;:false,&quot;orderTable&quot;:375,&quot;orderDeck&quot;:440}," calcext:value-type="string">
            <text:p>{"id":"4-66","name":"遁甲式烈火","displayName":"遁甲式烈火","kana":"とんこうしきれっか","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rarity":2,"type":4,"level":1,"color":1,"term":0,"trait":0,"power":null,"legacy":9,"anyNumCopies":false,"orderTable":375,"orderDeck":440},</text:p>
          </table:table-cell>
          <table:table-cell table:number-columns-repeated="16356"/>
        </table:table-row>
        <table:table-row table:style-name="ro2">
          <table:table-cell table:style-name="ce11" office:value-type="float" office:value="376" calcext:value-type="float">
            <text:p>376</text:p>
          </table:table-cell>
          <table:table-cell table:style-name="ce11" office:value-type="float" office:value="429" calcext:value-type="float">
            <text:p>429</text:p>
          </table:table-cell>
          <table:table-cell table:style-name="ce21" office:value-type="string" calcext:value-type="string">
            <text:p>4-67</text:p>
          </table:table-cell>
          <table:table-cell table:style-name="ce21" office:value-type="float" office:value="67" calcext:value-type="float">
            <text:p>67</text:p>
          </table:table-cell>
          <table:table-cell table:style-name="ce11" office:value-type="string" calcext:value-type="string">
            <text:p>レッドサークル</text:p>
          </table:table-cell>
          <table:table-cell table:style-name="ce11" table:formula="of:=[.E377]" office:value-type="string" office:string-value="レッドサークル" calcext:value-type="string">
            <text:p>レッドサークル</text:p>
          </table:table-cell>
          <table:table-cell table:style-name="ce11" office:value-type="string" calcext:value-type="string">
            <text:p>れっどさーくる</text:p>
          </table:table-cell>
          <table:table-cell table:style-name="ce11" office:value-type="string" calcext:value-type="string">
            <text:p>第４弾ブースターパック</text:p>
          </table:table-cell>
          <table:table-cell table:style-name="ce11" table:formula="of:=VLOOKUP([.H377];[$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77];[$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77];[$種類番号.$A$1:$種類番号.$B$4];2;0)" office:value-type="float" office:value="4" calcext:value-type="float">
            <text:p>4</text:p>
          </table:table-cell>
          <table:table-cell table:style-name="ce11" office:value-type="string" calcext:value-type="string">
            <text:p>赤</text:p>
          </table:table-cell>
          <table:table-cell table:style-name="ce11" table:formula="of:=VLOOKUP([.N377];[$色番号.$A$1:$色番号.$B$10];2;0)" office:value-type="float" office:value="1" calcext:value-type="float">
            <text:p>1</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77];[$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7];[$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7.png</text:p>
          </table:table-cell>
          <table:table-cell table:style-name="ce11" table:formula="of:=CONCATENATE([$JSON.$A$1];[.$C377];[$JSON.$B$1];[.$E377];[$JSON.$C$1];[.F377];[$JSON.$D$1];[.$G377];[$JSON.$E$1];IF(ISNA([.$T377]);&quot;null&quot;;&quot;&quot;&quot;&quot;&amp;[.$T377]&amp;&quot;&quot;&quot;&quot;);[$JSON.$F$1];[.$V377];[$JSON.$G$1];IF(ISNA([.$X377]);&quot;null&quot;;&quot;&quot;&quot;&quot;&amp;[.$X377]&amp;&quot;&quot;&quot;&quot;);[$JSON.$H$1];[.$AA377];[$JSON.$I$1];[.$I377];[$JSON.$J$1];[.K377];[$JSON.$K$1];[.$M377];[$JSON.$L$1];[.$P377];[$JSON.$M$1];[.$O377];[$JSON.$N$1];[.$S377];[$JSON.$O$1];[.$U377];[$JSON.$P$1];IF(ISNA([.$W377]);&quot;null&quot;;[.$W377]);[$JSON.$Q$1];[.$Y377];[$JSON.$R$1];IF([.$Z377];&quot;true&quot;;&quot;false&quot;);[$JSON.$S$1];[.$A377];[$JSON.$T$1];[.$B377];[$JSON.$U$1])" office:value-type="string" office:string-value="{&quot;id&quot;:&quot;4-67&quot;,&quot;name&quot;:&quot;レッドサークル&quot;,&quot;displayName&quot;:&quot;レッドサークル&quot;,&quot;kana&quot;:&quot;れっど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rarity&quot;:1,&quot;type&quot;:4,&quot;level&quot;:0,&quot;color&quot;:1,&quot;term&quot;:0,&quot;trait&quot;:0,&quot;power&quot;:null,&quot;legacy&quot;:5,&quot;anyNumCopies&quot;:false,&quot;orderTable&quot;:376,&quot;orderDeck&quot;:429}," calcext:value-type="string">
            <text:p>{"id":"4-67","name":"レッドサークル","displayName":"レッドサークル","kana":"れっどさーくる","traitText":null,"ruleText":"自分がイジン召喚する際、そのイジンのレベルは3だけ下がる。¶イジンが自分の戦場に置かれたとき、これを裏にする。","legacyText":"手札に戻す","imageUrl":"https://one-draw.jp/ijinden/cardlist/004/card/04_067.png","expansion":45,"rarity":1,"type":4,"level":0,"color":1,"term":0,"trait":0,"power":null,"legacy":5,"anyNumCopies":false,"orderTable":376,"orderDeck":429},</text:p>
          </table:table-cell>
          <table:table-cell table:number-columns-repeated="16356"/>
        </table:table-row>
        <table:table-row table:style-name="ro2">
          <table:table-cell table:style-name="ce11" office:value-type="float" office:value="377" calcext:value-type="float">
            <text:p>377</text:p>
          </table:table-cell>
          <table:table-cell table:style-name="ce11" office:value-type="float" office:value="447" calcext:value-type="float">
            <text:p>447</text:p>
          </table:table-cell>
          <table:table-cell table:style-name="ce21" office:value-type="string" calcext:value-type="string">
            <text:p>4-68</text:p>
          </table:table-cell>
          <table:table-cell table:style-name="ce21" office:value-type="float" office:value="68" calcext:value-type="float">
            <text:p>68</text:p>
          </table:table-cell>
          <table:table-cell table:style-name="ce11" office:value-type="string" calcext:value-type="string">
            <text:p>遁甲式水鏡</text:p>
          </table:table-cell>
          <table:table-cell table:style-name="ce11" table:formula="of:=[.E378]" office:value-type="string" office:string-value="遁甲式水鏡" calcext:value-type="string">
            <text:p>遁甲式水鏡</text:p>
          </table:table-cell>
          <table:table-cell table:style-name="ce11" office:value-type="string" calcext:value-type="string">
            <text:p>とんこうしきみかがみ</text:p>
          </table:table-cell>
          <table:table-cell table:style-name="ce11" office:value-type="string" calcext:value-type="string">
            <text:p>第４弾ブースターパック</text:p>
          </table:table-cell>
          <table:table-cell table:style-name="ce11" table:formula="of:=VLOOKUP([.H378];[$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78];[$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78];[$種類番号.$A$1:$種類番号.$B$4];2;0)" office:value-type="float" office:value="4" calcext:value-type="float">
            <text:p>4</text:p>
          </table:table-cell>
          <table:table-cell table:style-name="ce11" office:value-type="string" calcext:value-type="string">
            <text:p>青</text:p>
          </table:table-cell>
          <table:table-cell table:style-name="ce11" table:formula="of:=VLOOKUP([.N378];[$色番号.$A$1:$色番号.$B$10];2;0)" office:value-type="float" office:value="2" calcext:value-type="float">
            <text:p>2</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78];[$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78];[$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8.png</text:p>
          </table:table-cell>
          <table:table-cell table:style-name="ce11" table:formula="of:=CONCATENATE([$JSON.$A$1];[.$C378];[$JSON.$B$1];[.$E378];[$JSON.$C$1];[.F378];[$JSON.$D$1];[.$G378];[$JSON.$E$1];IF(ISNA([.$T378]);&quot;null&quot;;&quot;&quot;&quot;&quot;&amp;[.$T378]&amp;&quot;&quot;&quot;&quot;);[$JSON.$F$1];[.$V378];[$JSON.$G$1];IF(ISNA([.$X378]);&quot;null&quot;;&quot;&quot;&quot;&quot;&amp;[.$X378]&amp;&quot;&quot;&quot;&quot;);[$JSON.$H$1];[.$AA378];[$JSON.$I$1];[.$I378];[$JSON.$J$1];[.K378];[$JSON.$K$1];[.$M378];[$JSON.$L$1];[.$P378];[$JSON.$M$1];[.$O378];[$JSON.$N$1];[.$S378];[$JSON.$O$1];[.$U378];[$JSON.$P$1];IF(ISNA([.$W378]);&quot;null&quot;;[.$W378]);[$JSON.$Q$1];[.$Y378];[$JSON.$R$1];IF([.$Z378];&quot;true&quot;;&quot;false&quot;);[$JSON.$S$1];[.$A378];[$JSON.$T$1];[.$B378];[$JSON.$U$1])" office:value-type="string" office:string-value="{&quot;id&quot;:&quot;4-68&quot;,&quot;name&quot;:&quot;遁甲式水鏡&quot;,&quot;displayName&quot;:&quot;遁甲式水鏡&quot;,&quot;kana&quot;:&quot;とんこうしきみかがみ&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rarity&quot;:2,&quot;type&quot;:4,&quot;level&quot;:1,&quot;color&quot;:2,&quot;term&quot;:0,&quot;trait&quot;:0,&quot;power&quot;:null,&quot;legacy&quot;:9,&quot;anyNumCopies&quot;:false,&quot;orderTable&quot;:377,&quot;orderDeck&quot;:447}," calcext:value-type="string">
            <text:p>{"id":"4-68","name":"遁甲式水鏡","displayName":"遁甲式水鏡","kana":"とんこうしきみかがみ","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rarity":2,"type":4,"level":1,"color":2,"term":0,"trait":0,"power":null,"legacy":9,"anyNumCopies":false,"orderTable":377,"orderDeck":447},</text:p>
          </table:table-cell>
          <table:table-cell table:number-columns-repeated="16356"/>
        </table:table-row>
        <table:table-row table:style-name="ro2">
          <table:table-cell table:style-name="ce11" office:value-type="float" office:value="378" calcext:value-type="float">
            <text:p>378</text:p>
          </table:table-cell>
          <table:table-cell table:style-name="ce11" office:value-type="float" office:value="430" calcext:value-type="float">
            <text:p>430</text:p>
          </table:table-cell>
          <table:table-cell table:style-name="ce21" office:value-type="string" calcext:value-type="string">
            <text:p>4-69</text:p>
          </table:table-cell>
          <table:table-cell table:style-name="ce21" office:value-type="float" office:value="69" calcext:value-type="float">
            <text:p>69</text:p>
          </table:table-cell>
          <table:table-cell table:style-name="ce11" office:value-type="string" calcext:value-type="string">
            <text:p>ブルーサークル</text:p>
          </table:table-cell>
          <table:table-cell table:style-name="ce11" table:formula="of:=[.E379]" office:value-type="string" office:string-value="ブルーサークル" calcext:value-type="string">
            <text:p>ブルーサークル</text:p>
          </table:table-cell>
          <table:table-cell table:style-name="ce11" office:value-type="string" calcext:value-type="string">
            <text:p>ぶるーさーくる</text:p>
          </table:table-cell>
          <table:table-cell table:style-name="ce11" office:value-type="string" calcext:value-type="string">
            <text:p>第４弾ブースターパック</text:p>
          </table:table-cell>
          <table:table-cell table:style-name="ce11" table:formula="of:=VLOOKUP([.H379];[$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7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79];[$種類番号.$A$1:$種類番号.$B$4];2;0)" office:value-type="float" office:value="4" calcext:value-type="float">
            <text:p>4</text:p>
          </table:table-cell>
          <table:table-cell table:style-name="ce11" office:value-type="string" calcext:value-type="string">
            <text:p>青</text:p>
          </table:table-cell>
          <table:table-cell table:style-name="ce11" table:formula="of:=VLOOKUP([.N379];[$色番号.$A$1:$色番号.$B$10];2;0)" office:value-type="float" office:value="2" calcext:value-type="float">
            <text:p>2</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7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79];[$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79];[$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69.png</text:p>
          </table:table-cell>
          <table:table-cell table:style-name="ce11" table:formula="of:=CONCATENATE([$JSON.$A$1];[.$C379];[$JSON.$B$1];[.$E379];[$JSON.$C$1];[.F379];[$JSON.$D$1];[.$G379];[$JSON.$E$1];IF(ISNA([.$T379]);&quot;null&quot;;&quot;&quot;&quot;&quot;&amp;[.$T379]&amp;&quot;&quot;&quot;&quot;);[$JSON.$F$1];[.$V379];[$JSON.$G$1];IF(ISNA([.$X379]);&quot;null&quot;;&quot;&quot;&quot;&quot;&amp;[.$X379]&amp;&quot;&quot;&quot;&quot;);[$JSON.$H$1];[.$AA379];[$JSON.$I$1];[.$I379];[$JSON.$J$1];[.K379];[$JSON.$K$1];[.$M379];[$JSON.$L$1];[.$P379];[$JSON.$M$1];[.$O379];[$JSON.$N$1];[.$S379];[$JSON.$O$1];[.$U379];[$JSON.$P$1];IF(ISNA([.$W379]);&quot;null&quot;;[.$W379]);[$JSON.$Q$1];[.$Y379];[$JSON.$R$1];IF([.$Z379];&quot;true&quot;;&quot;false&quot;);[$JSON.$S$1];[.$A379];[$JSON.$T$1];[.$B379];[$JSON.$U$1])" office:value-type="string" office:string-value="{&quot;id&quot;:&quot;4-69&quot;,&quot;name&quot;:&quot;ブルーサークル&quot;,&quot;displayName&quot;:&quot;ブルーサークル&quot;,&quot;kana&quot;:&quot;ぶる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rarity&quot;:1,&quot;type&quot;:4,&quot;level&quot;:0,&quot;color&quot;:2,&quot;term&quot;:0,&quot;trait&quot;:0,&quot;power&quot;:null,&quot;legacy&quot;:5,&quot;anyNumCopies&quot;:false,&quot;orderTable&quot;:378,&quot;orderDeck&quot;:430}," calcext:value-type="string">
            <text:p>{"id":"4-69","name":"ブルーサークル","displayName":"ブルーサークル","kana":"ぶるーさーくる","traitText":null,"ruleText":"自分がイジン召喚する際、そのイジンのレベルは3だけ下がる。¶イジンが自分の戦場に置かれたとき、これを裏にする。","legacyText":"手札に戻す","imageUrl":"https://one-draw.jp/ijinden/cardlist/004/card/04_069.png","expansion":45,"rarity":1,"type":4,"level":0,"color":2,"term":0,"trait":0,"power":null,"legacy":5,"anyNumCopies":false,"orderTable":378,"orderDeck":430},</text:p>
          </table:table-cell>
          <table:table-cell table:number-columns-repeated="16356"/>
        </table:table-row>
        <table:table-row table:style-name="ro2">
          <table:table-cell table:style-name="ce11" office:value-type="float" office:value="379" calcext:value-type="float">
            <text:p>379</text:p>
          </table:table-cell>
          <table:table-cell table:style-name="ce11" office:value-type="float" office:value="454" calcext:value-type="float">
            <text:p>454</text:p>
          </table:table-cell>
          <table:table-cell table:style-name="ce21" office:value-type="string" calcext:value-type="string">
            <text:p>4-70</text:p>
          </table:table-cell>
          <table:table-cell table:style-name="ce21" office:value-type="float" office:value="70" calcext:value-type="float">
            <text:p>70</text:p>
          </table:table-cell>
          <table:table-cell table:style-name="ce11" office:value-type="string" calcext:value-type="string">
            <text:p>遁甲式木蓮</text:p>
          </table:table-cell>
          <table:table-cell table:style-name="ce11" table:formula="of:=[.E380]" office:value-type="string" office:string-value="遁甲式木蓮" calcext:value-type="string">
            <text:p>遁甲式木蓮</text:p>
          </table:table-cell>
          <table:table-cell table:style-name="ce11" office:value-type="string" calcext:value-type="string">
            <text:p>とんこうしきもくれん</text:p>
          </table:table-cell>
          <table:table-cell table:style-name="ce11" office:value-type="string" calcext:value-type="string">
            <text:p>第４弾ブースターパック</text:p>
          </table:table-cell>
          <table:table-cell table:style-name="ce11" table:formula="of:=VLOOKUP([.H380];[$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80];[$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80];[$種類番号.$A$1:$種類番号.$B$4];2;0)" office:value-type="float" office:value="4" calcext:value-type="float">
            <text:p>4</text:p>
          </table:table-cell>
          <table:table-cell table:style-name="ce11" office:value-type="string" calcext:value-type="string">
            <text:p>緑</text:p>
          </table:table-cell>
          <table:table-cell table:style-name="ce11" table:formula="of:=VLOOKUP([.N380];[$色番号.$A$1:$色番号.$B$10];2;0)" office:value-type="float" office:value="4" calcext:value-type="float">
            <text:p>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80];[$特性番号.$A$1:$特性番号.$B$8];2;0);0)" office:value-type="float" office:value="0" calcext:value-type="float">
            <text:p>0</text:p>
          </table:table-cell>
          <table:table-cell table:style-name="ce11"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style-name="ce11" table:formula="of:=NA()" office:value-type="string" office:string-value="" calcext:value-type="error">
            <text:p>#N/A</text:p>
          </table:table-cell>
          <table:table-cell table:style-name="ce25" office:value-type="string" calcext:value-type="string">
            <text:p>喪神</text:p>
          </table:table-cell>
          <table:table-cell table:style-name="ce11" table:formula="of:=IFERROR(VLOOKUP([.$X380];[$遺業能力番号.$A$1:$遺業能力番号.$B$9];2;0);0)" office:value-type="float" office:value="9" calcext:value-type="float">
            <text:p>9</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0.png</text:p>
          </table:table-cell>
          <table:table-cell table:style-name="ce11" table:formula="of:=CONCATENATE([$JSON.$A$1];[.$C380];[$JSON.$B$1];[.$E380];[$JSON.$C$1];[.F380];[$JSON.$D$1];[.$G380];[$JSON.$E$1];IF(ISNA([.$T380]);&quot;null&quot;;&quot;&quot;&quot;&quot;&amp;[.$T380]&amp;&quot;&quot;&quot;&quot;);[$JSON.$F$1];[.$V380];[$JSON.$G$1];IF(ISNA([.$X380]);&quot;null&quot;;&quot;&quot;&quot;&quot;&amp;[.$X380]&amp;&quot;&quot;&quot;&quot;);[$JSON.$H$1];[.$AA380];[$JSON.$I$1];[.$I380];[$JSON.$J$1];[.K380];[$JSON.$K$1];[.$M380];[$JSON.$L$1];[.$P380];[$JSON.$M$1];[.$O380];[$JSON.$N$1];[.$S380];[$JSON.$O$1];[.$U380];[$JSON.$P$1];IF(ISNA([.$W380]);&quot;null&quot;;[.$W380]);[$JSON.$Q$1];[.$Y380];[$JSON.$R$1];IF([.$Z380];&quot;true&quot;;&quot;false&quot;);[$JSON.$S$1];[.$A380];[$JSON.$T$1];[.$B380];[$JSON.$U$1])" office:value-type="string" office:string-value="{&quot;id&quot;:&quot;4-70&quot;,&quot;name&quot;:&quot;遁甲式木蓮&quot;,&quot;displayName&quot;:&quot;遁甲式木蓮&quot;,&quot;kana&quot;:&quot;とんこうしきもくれん&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rarity&quot;:2,&quot;type&quot;:4,&quot;level&quot;:1,&quot;color&quot;:4,&quot;term&quot;:0,&quot;trait&quot;:0,&quot;power&quot;:null,&quot;legacy&quot;:9,&quot;anyNumCopies&quot;:false,&quot;orderTable&quot;:379,&quot;orderDeck&quot;:454}," calcext:value-type="string">
            <text:p>{"id":"4-70","name":"遁甲式木蓮","displayName":"遁甲式木蓮","kana":"とんこうしきもくれん","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rarity":2,"type":4,"level":1,"color":4,"term":0,"trait":0,"power":null,"legacy":9,"anyNumCopies":false,"orderTable":379,"orderDeck":454},</text:p>
          </table:table-cell>
          <table:table-cell table:number-columns-repeated="16356"/>
        </table:table-row>
        <table:table-row table:style-name="ro2">
          <table:table-cell table:style-name="ce11" office:value-type="float" office:value="380" calcext:value-type="float">
            <text:p>380</text:p>
          </table:table-cell>
          <table:table-cell table:style-name="ce11" office:value-type="float" office:value="431" calcext:value-type="float">
            <text:p>431</text:p>
          </table:table-cell>
          <table:table-cell table:style-name="ce21" office:value-type="string" calcext:value-type="string">
            <text:p>4-71</text:p>
          </table:table-cell>
          <table:table-cell table:style-name="ce21" office:value-type="float" office:value="71" calcext:value-type="float">
            <text:p>71</text:p>
          </table:table-cell>
          <table:table-cell table:style-name="ce11" office:value-type="string" calcext:value-type="string">
            <text:p>グリーンサークル</text:p>
          </table:table-cell>
          <table:table-cell table:style-name="ce11" table:formula="of:=[.E381]" office:value-type="string" office:string-value="グリーンサークル" calcext:value-type="string">
            <text:p>グリーンサークル</text:p>
          </table:table-cell>
          <table:table-cell table:style-name="ce11" office:value-type="string" calcext:value-type="string">
            <text:p>ぐりーんさーくる</text:p>
          </table:table-cell>
          <table:table-cell table:style-name="ce11" office:value-type="string" calcext:value-type="string">
            <text:p>第４弾ブースターパック</text:p>
          </table:table-cell>
          <table:table-cell table:style-name="ce11" table:formula="of:=VLOOKUP([.H381];[$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81];[$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1];[$種類番号.$A$1:$種類番号.$B$4];2;0)" office:value-type="float" office:value="4" calcext:value-type="float">
            <text:p>4</text:p>
          </table:table-cell>
          <table:table-cell table:style-name="ce11" office:value-type="string" calcext:value-type="string">
            <text:p>緑</text:p>
          </table:table-cell>
          <table:table-cell table:style-name="ce11" table:formula="of:=VLOOKUP([.N381];[$色番号.$A$1:$色番号.$B$10];2;0)" office:value-type="float" office:value="4" calcext:value-type="float">
            <text:p>4</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81];[$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1];[$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1.png</text:p>
          </table:table-cell>
          <table:table-cell table:style-name="ce11" table:formula="of:=CONCATENATE([$JSON.$A$1];[.$C381];[$JSON.$B$1];[.$E381];[$JSON.$C$1];[.F381];[$JSON.$D$1];[.$G381];[$JSON.$E$1];IF(ISNA([.$T381]);&quot;null&quot;;&quot;&quot;&quot;&quot;&amp;[.$T381]&amp;&quot;&quot;&quot;&quot;);[$JSON.$F$1];[.$V381];[$JSON.$G$1];IF(ISNA([.$X381]);&quot;null&quot;;&quot;&quot;&quot;&quot;&amp;[.$X381]&amp;&quot;&quot;&quot;&quot;);[$JSON.$H$1];[.$AA381];[$JSON.$I$1];[.$I381];[$JSON.$J$1];[.K381];[$JSON.$K$1];[.$M381];[$JSON.$L$1];[.$P381];[$JSON.$M$1];[.$O381];[$JSON.$N$1];[.$S381];[$JSON.$O$1];[.$U381];[$JSON.$P$1];IF(ISNA([.$W381]);&quot;null&quot;;[.$W381]);[$JSON.$Q$1];[.$Y381];[$JSON.$R$1];IF([.$Z381];&quot;true&quot;;&quot;false&quot;);[$JSON.$S$1];[.$A381];[$JSON.$T$1];[.$B381];[$JSON.$U$1])" office:value-type="string" office:string-value="{&quot;id&quot;:&quot;4-71&quot;,&quot;name&quot;:&quot;グリーンサークル&quot;,&quot;displayName&quot;:&quot;グリーンサークル&quot;,&quot;kana&quot;:&quot;ぐりーん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rarity&quot;:1,&quot;type&quot;:4,&quot;level&quot;:0,&quot;color&quot;:4,&quot;term&quot;:0,&quot;trait&quot;:0,&quot;power&quot;:null,&quot;legacy&quot;:5,&quot;anyNumCopies&quot;:false,&quot;orderTable&quot;:380,&quot;orderDeck&quot;:431}," calcext:value-type="string">
            <text:p>{"id":"4-71","name":"グリーンサークル","displayName":"グリーンサークル","kana":"ぐりーんさーくる","traitText":null,"ruleText":"自分がイジン召喚する際、そのイジンのレベルは3だけ下がる。¶イジンが自分の戦場に置かれたとき、これを裏にする。","legacyText":"手札に戻す","imageUrl":"https://one-draw.jp/ijinden/cardlist/004/card/04_071.png","expansion":45,"rarity":1,"type":4,"level":0,"color":4,"term":0,"trait":0,"power":null,"legacy":5,"anyNumCopies":false,"orderTable":380,"orderDeck":431},</text:p>
          </table:table-cell>
          <table:table-cell table:number-columns-repeated="16356"/>
        </table:table-row>
        <table:table-row table:style-name="ro2">
          <table:table-cell table:style-name="ce11" office:value-type="float" office:value="381" calcext:value-type="float">
            <text:p>381</text:p>
          </table:table-cell>
          <table:table-cell table:style-name="ce11" office:value-type="float" office:value="460" calcext:value-type="float">
            <text:p>460</text:p>
          </table:table-cell>
          <table:table-cell table:style-name="ce21" office:value-type="string" calcext:value-type="string">
            <text:p>4-72</text:p>
          </table:table-cell>
          <table:table-cell table:style-name="ce21" office:value-type="float" office:value="72" calcext:value-type="float">
            <text:p>72</text:p>
          </table:table-cell>
          <table:table-cell table:style-name="ce11" office:value-type="string" calcext:value-type="string">
            <text:p>ラ・コロール</text:p>
          </table:table-cell>
          <table:table-cell table:style-name="ce11" table:formula="of:=[.E382]" office:value-type="string" office:string-value="ラ・コロール" calcext:value-type="string">
            <text:p>ラ・コロール</text:p>
          </table:table-cell>
          <table:table-cell table:style-name="ce11" office:value-type="string" calcext:value-type="string">
            <text:p>らころーる</text:p>
          </table:table-cell>
          <table:table-cell table:style-name="ce11" office:value-type="string" calcext:value-type="string">
            <text:p>第４弾ブースターパック</text:p>
          </table:table-cell>
          <table:table-cell table:style-name="ce11" table:formula="of:=VLOOKUP([.H382];[$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82];[$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2];[$種類番号.$A$1:$種類番号.$B$4];2;0)" office:value-type="float" office:value="4" calcext:value-type="float">
            <text:p>4</text:p>
          </table:table-cell>
          <table:table-cell table:style-name="ce11" office:value-type="string" calcext:value-type="string">
            <text:p>黄</text:p>
          </table:table-cell>
          <table:table-cell table:style-name="ce11" table:formula="of:=VLOOKUP([.N382];[$色番号.$A$1:$色番号.$B$10];2;0)" office:value-type="float" office:value="8" calcext:value-type="float">
            <text:p>8</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82];[$特性番号.$A$1:$特性番号.$B$8];2;0);0)" office:value-type="float" office:value="0" calcext:value-type="float">
            <text:p>0</text:p>
          </table:table-cell>
          <table:table-cell table:style-name="ce11"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2];[$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2.png</text:p>
          </table:table-cell>
          <table:table-cell table:style-name="ce11" table:formula="of:=CONCATENATE([$JSON.$A$1];[.$C382];[$JSON.$B$1];[.$E382];[$JSON.$C$1];[.F382];[$JSON.$D$1];[.$G382];[$JSON.$E$1];IF(ISNA([.$T382]);&quot;null&quot;;&quot;&quot;&quot;&quot;&amp;[.$T382]&amp;&quot;&quot;&quot;&quot;);[$JSON.$F$1];[.$V382];[$JSON.$G$1];IF(ISNA([.$X382]);&quot;null&quot;;&quot;&quot;&quot;&quot;&amp;[.$X382]&amp;&quot;&quot;&quot;&quot;);[$JSON.$H$1];[.$AA382];[$JSON.$I$1];[.$I382];[$JSON.$J$1];[.K382];[$JSON.$K$1];[.$M382];[$JSON.$L$1];[.$P382];[$JSON.$M$1];[.$O382];[$JSON.$N$1];[.$S382];[$JSON.$O$1];[.$U382];[$JSON.$P$1];IF(ISNA([.$W382]);&quot;null&quot;;[.$W382]);[$JSON.$Q$1];[.$Y382];[$JSON.$R$1];IF([.$Z382];&quot;true&quot;;&quot;false&quot;);[$JSON.$S$1];[.$A382];[$JSON.$T$1];[.$B382];[$JSON.$U$1])" office:value-type="string" office:string-value="{&quot;id&quot;:&quot;4-72&quot;,&quot;name&quot;:&quot;ラ・コロール&quot;,&quot;displayName&quot;:&quot;ラ・コロール&quot;,&quot;kana&quot;:&quot;らころーる&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rarity&quot;:1,&quot;type&quot;:4,&quot;level&quot;:1,&quot;color&quot;:8,&quot;term&quot;:0,&quot;trait&quot;:0,&quot;power&quot;:null,&quot;legacy&quot;:3,&quot;anyNumCopies&quot;:false,&quot;orderTable&quot;:381,&quot;orderDeck&quot;:460}," calcext:value-type="string">
            <text:p>{"id":"4-72","name":"ラ・コロール","displayName":"ラ・コロール","kana":"らころーる","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rarity":1,"type":4,"level":1,"color":8,"term":0,"trait":0,"power":null,"legacy":3,"anyNumCopies":false,"orderTable":381,"orderDeck":460},</text:p>
          </table:table-cell>
          <table:table-cell table:number-columns-repeated="16356"/>
        </table:table-row>
        <table:table-row table:style-name="ro2">
          <table:table-cell table:style-name="ce11" office:value-type="float" office:value="382" calcext:value-type="float">
            <text:p>382</text:p>
          </table:table-cell>
          <table:table-cell table:style-name="ce11" office:value-type="float" office:value="432" calcext:value-type="float">
            <text:p>432</text:p>
          </table:table-cell>
          <table:table-cell table:style-name="ce21" office:value-type="string" calcext:value-type="string">
            <text:p>4-73</text:p>
          </table:table-cell>
          <table:table-cell table:style-name="ce21" office:value-type="float" office:value="73" calcext:value-type="float">
            <text:p>73</text:p>
          </table:table-cell>
          <table:table-cell table:style-name="ce11" office:value-type="string" calcext:value-type="string">
            <text:p>イエローサークル</text:p>
          </table:table-cell>
          <table:table-cell table:style-name="ce11" table:formula="of:=[.E383]" office:value-type="string" office:string-value="イエローサークル" calcext:value-type="string">
            <text:p>イエローサークル</text:p>
          </table:table-cell>
          <table:table-cell table:style-name="ce11" office:value-type="string" calcext:value-type="string">
            <text:p>いえろーさーくる</text:p>
          </table:table-cell>
          <table:table-cell table:style-name="ce11" office:value-type="string" calcext:value-type="string">
            <text:p>第４弾ブースターパック</text:p>
          </table:table-cell>
          <table:table-cell table:style-name="ce11" table:formula="of:=VLOOKUP([.H383];[$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83];[$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3];[$種類番号.$A$1:$種類番号.$B$4];2;0)" office:value-type="float" office:value="4" calcext:value-type="float">
            <text:p>4</text:p>
          </table:table-cell>
          <table:table-cell table:style-name="ce11" office:value-type="string" calcext:value-type="string">
            <text:p>黄</text:p>
          </table:table-cell>
          <table:table-cell table:style-name="ce11" table:formula="of:=VLOOKUP([.N383];[$色番号.$A$1:$色番号.$B$10];2;0)" office:value-type="float" office:value="8" calcext:value-type="float">
            <text:p>8</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83];[$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3];[$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3.png</text:p>
          </table:table-cell>
          <table:table-cell table:style-name="ce11" table:formula="of:=CONCATENATE([$JSON.$A$1];[.$C383];[$JSON.$B$1];[.$E383];[$JSON.$C$1];[.F383];[$JSON.$D$1];[.$G383];[$JSON.$E$1];IF(ISNA([.$T383]);&quot;null&quot;;&quot;&quot;&quot;&quot;&amp;[.$T383]&amp;&quot;&quot;&quot;&quot;);[$JSON.$F$1];[.$V383];[$JSON.$G$1];IF(ISNA([.$X383]);&quot;null&quot;;&quot;&quot;&quot;&quot;&amp;[.$X383]&amp;&quot;&quot;&quot;&quot;);[$JSON.$H$1];[.$AA383];[$JSON.$I$1];[.$I383];[$JSON.$J$1];[.K383];[$JSON.$K$1];[.$M383];[$JSON.$L$1];[.$P383];[$JSON.$M$1];[.$O383];[$JSON.$N$1];[.$S383];[$JSON.$O$1];[.$U383];[$JSON.$P$1];IF(ISNA([.$W383]);&quot;null&quot;;[.$W383]);[$JSON.$Q$1];[.$Y383];[$JSON.$R$1];IF([.$Z383];&quot;true&quot;;&quot;false&quot;);[$JSON.$S$1];[.$A383];[$JSON.$T$1];[.$B383];[$JSON.$U$1])" office:value-type="string" office:string-value="{&quot;id&quot;:&quot;4-73&quot;,&quot;name&quot;:&quot;イエローサークル&quot;,&quot;displayName&quot;:&quot;イエローサークル&quot;,&quot;kana&quot;:&quot;いえろ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rarity&quot;:1,&quot;type&quot;:4,&quot;level&quot;:0,&quot;color&quot;:8,&quot;term&quot;:0,&quot;trait&quot;:0,&quot;power&quot;:null,&quot;legacy&quot;:5,&quot;anyNumCopies&quot;:false,&quot;orderTable&quot;:382,&quot;orderDeck&quot;:432}," calcext:value-type="string">
            <text:p>{"id":"4-73","name":"イエローサークル","displayName":"イエローサークル","kana":"いえろーさーくる","traitText":null,"ruleText":"自分がイジン召喚する際、そのイジンのレベルは3だけ下がる。¶イジンが自分の戦場に置かれたとき、これを裏にする。","legacyText":"手札に戻す","imageUrl":"https://one-draw.jp/ijinden/cardlist/004/card/04_073.png","expansion":45,"rarity":1,"type":4,"level":0,"color":8,"term":0,"trait":0,"power":null,"legacy":5,"anyNumCopies":false,"orderTable":382,"orderDeck":432},</text:p>
          </table:table-cell>
          <table:table-cell table:number-columns-repeated="16356"/>
        </table:table-row>
        <table:table-row table:style-name="ro2">
          <table:table-cell table:style-name="ce11" office:value-type="float" office:value="383" calcext:value-type="float">
            <text:p>383</text:p>
          </table:table-cell>
          <table:table-cell table:style-name="ce11" office:value-type="float" office:value="467" calcext:value-type="float">
            <text:p>467</text:p>
          </table:table-cell>
          <table:table-cell table:style-name="ce21" office:value-type="string" calcext:value-type="string">
            <text:p>4-74</text:p>
          </table:table-cell>
          <table:table-cell table:style-name="ce21" office:value-type="float" office:value="74" calcext:value-type="float">
            <text:p>74</text:p>
          </table:table-cell>
          <table:table-cell table:style-name="ce11" office:value-type="string" calcext:value-type="string">
            <text:p>ディ・クローネ</text:p>
          </table:table-cell>
          <table:table-cell table:style-name="ce11" table:formula="of:=[.E384]" office:value-type="string" office:string-value="ディ・クローネ" calcext:value-type="string">
            <text:p>ディ・クローネ</text:p>
          </table:table-cell>
          <table:table-cell table:style-name="ce11" office:value-type="string" calcext:value-type="string">
            <text:p>でぃくろーね</text:p>
          </table:table-cell>
          <table:table-cell table:style-name="ce11" office:value-type="string" calcext:value-type="string">
            <text:p>第４弾ブースターパック</text:p>
          </table:table-cell>
          <table:table-cell table:style-name="ce11" table:formula="of:=VLOOKUP([.H384];[$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84];[$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4];[$種類番号.$A$1:$種類番号.$B$4];2;0)" office:value-type="float" office:value="4" calcext:value-type="float">
            <text:p>4</text:p>
          </table:table-cell>
          <table:table-cell table:style-name="ce11" office:value-type="string" calcext:value-type="string">
            <text:p>紫</text:p>
          </table:table-cell>
          <table:table-cell table:style-name="ce11" table:formula="of:=VLOOKUP([.N384];[$色番号.$A$1:$色番号.$B$10];2;0)" office:value-type="float" office:value="16" calcext:value-type="float">
            <text:p>16</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84];[$特性番号.$A$1:$特性番号.$B$8];2;0);0)" office:value-type="float" office:value="0" calcext:value-type="float">
            <text:p>0</text:p>
          </table:table-cell>
          <table:table-cell table:style-name="ce11"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4];[$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4.png</text:p>
          </table:table-cell>
          <table:table-cell table:style-name="ce11" table:formula="of:=CONCATENATE([$JSON.$A$1];[.$C384];[$JSON.$B$1];[.$E384];[$JSON.$C$1];[.F384];[$JSON.$D$1];[.$G384];[$JSON.$E$1];IF(ISNA([.$T384]);&quot;null&quot;;&quot;&quot;&quot;&quot;&amp;[.$T384]&amp;&quot;&quot;&quot;&quot;);[$JSON.$F$1];[.$V384];[$JSON.$G$1];IF(ISNA([.$X384]);&quot;null&quot;;&quot;&quot;&quot;&quot;&amp;[.$X384]&amp;&quot;&quot;&quot;&quot;);[$JSON.$H$1];[.$AA384];[$JSON.$I$1];[.$I384];[$JSON.$J$1];[.K384];[$JSON.$K$1];[.$M384];[$JSON.$L$1];[.$P384];[$JSON.$M$1];[.$O384];[$JSON.$N$1];[.$S384];[$JSON.$O$1];[.$U384];[$JSON.$P$1];IF(ISNA([.$W384]);&quot;null&quot;;[.$W384]);[$JSON.$Q$1];[.$Y384];[$JSON.$R$1];IF([.$Z384];&quot;true&quot;;&quot;false&quot;);[$JSON.$S$1];[.$A384];[$JSON.$T$1];[.$B384];[$JSON.$U$1])" office:value-type="string" office:string-value="{&quot;id&quot;:&quot;4-74&quot;,&quot;name&quot;:&quot;ディ・クローネ&quot;,&quot;displayName&quot;:&quot;ディ・クローネ&quot;,&quot;kana&quot;:&quot;でぃくろーね&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rarity&quot;:1,&quot;type&quot;:4,&quot;level&quot;:1,&quot;color&quot;:16,&quot;term&quot;:0,&quot;trait&quot;:0,&quot;power&quot;:null,&quot;legacy&quot;:3,&quot;anyNumCopies&quot;:false,&quot;orderTable&quot;:383,&quot;orderDeck&quot;:467}," calcext:value-type="string">
            <text:p>{"id":"4-74","name":"ディ・クローネ","displayName":"ディ・クローネ","kana":"でぃくろーね","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rarity":1,"type":4,"level":1,"color":16,"term":0,"trait":0,"power":null,"legacy":3,"anyNumCopies":false,"orderTable":383,"orderDeck":467},</text:p>
          </table:table-cell>
          <table:table-cell table:number-columns-repeated="16356"/>
        </table:table-row>
        <table:table-row table:style-name="ro2">
          <table:table-cell table:style-name="ce11" office:value-type="float" office:value="384" calcext:value-type="float">
            <text:p>384</text:p>
          </table:table-cell>
          <table:table-cell table:style-name="ce11" office:value-type="float" office:value="433" calcext:value-type="float">
            <text:p>433</text:p>
          </table:table-cell>
          <table:table-cell table:style-name="ce21" office:value-type="string" calcext:value-type="string">
            <text:p>4-75</text:p>
          </table:table-cell>
          <table:table-cell table:style-name="ce21" office:value-type="float" office:value="75" calcext:value-type="float">
            <text:p>75</text:p>
          </table:table-cell>
          <table:table-cell table:style-name="ce11" office:value-type="string" calcext:value-type="string">
            <text:p>パープルサークル</text:p>
          </table:table-cell>
          <table:table-cell table:style-name="ce11" table:formula="of:=[.E385]" office:value-type="string" office:string-value="パープルサークル" calcext:value-type="string">
            <text:p>パープルサークル</text:p>
          </table:table-cell>
          <table:table-cell table:style-name="ce11" office:value-type="string" calcext:value-type="string">
            <text:p>ぱーぷるさーくる</text:p>
          </table:table-cell>
          <table:table-cell table:style-name="ce11" office:value-type="string" calcext:value-type="string">
            <text:p>第４弾ブースターパック</text:p>
          </table:table-cell>
          <table:table-cell table:style-name="ce11" table:formula="of:=VLOOKUP([.H385];[$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85];[$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5];[$種類番号.$A$1:$種類番号.$B$4];2;0)" office:value-type="float" office:value="4" calcext:value-type="float">
            <text:p>4</text:p>
          </table:table-cell>
          <table:table-cell table:style-name="ce11" office:value-type="string" calcext:value-type="string">
            <text:p>紫</text:p>
          </table:table-cell>
          <table:table-cell table:style-name="ce11" table:formula="of:=VLOOKUP([.N385];[$色番号.$A$1:$色番号.$B$10];2;0)" office:value-type="float" office:value="16" calcext:value-type="float">
            <text:p>16</text:p>
          </table:table-cell>
          <table:table-cell table:style-name="ce11" office:value-type="float" office:value="0" calcext:value-type="float">
            <text:p>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85];[$特性番号.$A$1:$特性番号.$B$8];2;0);0)" office:value-type="float" office:value="0" calcext:value-type="float">
            <text:p>0</text:p>
          </table:table-cell>
          <table:table-cell table:style-name="ce11" office:value-type="string" calcext:value-type="string">
            <text:p>自分がイジン召喚する際、そのイジンのレベルは3だけ下がる。¶イジンが自分の戦場に置かれたとき、これを裏にする。</text:p>
          </table:table-cell>
          <table:table-cell table:style-name="ce11" table:formula="of:=NA()" office:value-type="string" office:string-value="" calcext:value-type="error">
            <text:p>#N/A</text:p>
          </table:table-cell>
          <table:table-cell table:style-name="ce25" office:value-type="string" calcext:value-type="string">
            <text:p>手札に戻す</text:p>
          </table:table-cell>
          <table:table-cell table:style-name="ce11" table:formula="of:=IFERROR(VLOOKUP([.$X385];[$遺業能力番号.$A$1:$遺業能力番号.$B$9];2;0);0)" office:value-type="float" office:value="5" calcext:value-type="float">
            <text:p>5</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5.png</text:p>
          </table:table-cell>
          <table:table-cell table:style-name="ce11" table:formula="of:=CONCATENATE([$JSON.$A$1];[.$C385];[$JSON.$B$1];[.$E385];[$JSON.$C$1];[.F385];[$JSON.$D$1];[.$G385];[$JSON.$E$1];IF(ISNA([.$T385]);&quot;null&quot;;&quot;&quot;&quot;&quot;&amp;[.$T385]&amp;&quot;&quot;&quot;&quot;);[$JSON.$F$1];[.$V385];[$JSON.$G$1];IF(ISNA([.$X385]);&quot;null&quot;;&quot;&quot;&quot;&quot;&amp;[.$X385]&amp;&quot;&quot;&quot;&quot;);[$JSON.$H$1];[.$AA385];[$JSON.$I$1];[.$I385];[$JSON.$J$1];[.K385];[$JSON.$K$1];[.$M385];[$JSON.$L$1];[.$P385];[$JSON.$M$1];[.$O385];[$JSON.$N$1];[.$S385];[$JSON.$O$1];[.$U385];[$JSON.$P$1];IF(ISNA([.$W385]);&quot;null&quot;;[.$W385]);[$JSON.$Q$1];[.$Y385];[$JSON.$R$1];IF([.$Z385];&quot;true&quot;;&quot;false&quot;);[$JSON.$S$1];[.$A385];[$JSON.$T$1];[.$B385];[$JSON.$U$1])" office:value-type="string" office:string-value="{&quot;id&quot;:&quot;4-75&quot;,&quot;name&quot;:&quot;パープルサークル&quot;,&quot;displayName&quot;:&quot;パープルサークル&quot;,&quot;kana&quot;:&quot;ぱーぷる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rarity&quot;:1,&quot;type&quot;:4,&quot;level&quot;:0,&quot;color&quot;:16,&quot;term&quot;:0,&quot;trait&quot;:0,&quot;power&quot;:null,&quot;legacy&quot;:5,&quot;anyNumCopies&quot;:false,&quot;orderTable&quot;:384,&quot;orderDeck&quot;:433}," calcext:value-type="string">
            <text:p>{"id":"4-75","name":"パープルサークル","displayName":"パープルサークル","kana":"ぱーぷるさーくる","traitText":null,"ruleText":"自分がイジン召喚する際、そのイジンのレベルは3だけ下がる。¶イジンが自分の戦場に置かれたとき、これを裏にする。","legacyText":"手札に戻す","imageUrl":"https://one-draw.jp/ijinden/cardlist/004/card/04_075.png","expansion":45,"rarity":1,"type":4,"level":0,"color":16,"term":0,"trait":0,"power":null,"legacy":5,"anyNumCopies":false,"orderTable":384,"orderDeck":433},</text:p>
          </table:table-cell>
          <table:table-cell table:number-columns-repeated="16356"/>
        </table:table-row>
        <table:table-row table:style-name="ro2">
          <table:table-cell table:style-name="ce11" office:value-type="float" office:value="385" calcext:value-type="float">
            <text:p>385</text:p>
          </table:table-cell>
          <table:table-cell table:style-name="ce11" office:value-type="float" office:value="474" calcext:value-type="float">
            <text:p>474</text:p>
          </table:table-cell>
          <table:table-cell table:style-name="ce21" office:value-type="string" calcext:value-type="string">
            <text:p>4-76</text:p>
          </table:table-cell>
          <table:table-cell table:style-name="ce21" office:value-type="float" office:value="76" calcext:value-type="float">
            <text:p>76</text:p>
          </table:table-cell>
          <table:table-cell table:style-name="ce11" office:value-type="string" calcext:value-type="string">
            <text:p>トランスポーター</text:p>
          </table:table-cell>
          <table:table-cell table:style-name="ce11" table:formula="of:=[.E386]" office:value-type="string" office:string-value="トランスポーター" calcext:value-type="string">
            <text:p>トランスポーター</text:p>
          </table:table-cell>
          <table:table-cell table:style-name="ce11" office:value-type="string" calcext:value-type="string">
            <text:p>とらんすぽーたー</text:p>
          </table:table-cell>
          <table:table-cell table:style-name="ce11" office:value-type="string" calcext:value-type="string">
            <text:p>第４弾ブースターパック</text:p>
          </table:table-cell>
          <table:table-cell table:style-name="ce11" table:formula="of:=VLOOKUP([.H386];[$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86];[$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6];[$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6];[$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86];[$特性番号.$A$1:$特性番号.$B$8];2;0);0)" office:value-type="float" office:value="0" calcext:value-type="float">
            <text:p>0</text:p>
          </table:table-cell>
          <table:table-cell table:style-name="ce11"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style-name="ce11" table:formula="of:=NA()" office:value-type="string" office:string-value="" calcext:value-type="error">
            <text:p>#N/A</text:p>
          </table:table-cell>
          <table:table-cell table:style-name="ce25" office:value-type="string" calcext:value-type="string">
            <text:p>1ドローする</text:p>
          </table:table-cell>
          <table:table-cell table:style-name="ce11" table:formula="of:=IFERROR(VLOOKUP([.$X386];[$遺業能力番号.$A$1:$遺業能力番号.$B$9];2;0);0)" office:value-type="float" office:value="4" calcext:value-type="float">
            <text:p>4</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6.png</text:p>
          </table:table-cell>
          <table:table-cell table:style-name="ce11" table:formula="of:=CONCATENATE([$JSON.$A$1];[.$C386];[$JSON.$B$1];[.$E386];[$JSON.$C$1];[.F386];[$JSON.$D$1];[.$G386];[$JSON.$E$1];IF(ISNA([.$T386]);&quot;null&quot;;&quot;&quot;&quot;&quot;&amp;[.$T386]&amp;&quot;&quot;&quot;&quot;);[$JSON.$F$1];[.$V386];[$JSON.$G$1];IF(ISNA([.$X386]);&quot;null&quot;;&quot;&quot;&quot;&quot;&amp;[.$X386]&amp;&quot;&quot;&quot;&quot;);[$JSON.$H$1];[.$AA386];[$JSON.$I$1];[.$I386];[$JSON.$J$1];[.K386];[$JSON.$K$1];[.$M386];[$JSON.$L$1];[.$P386];[$JSON.$M$1];[.$O386];[$JSON.$N$1];[.$S386];[$JSON.$O$1];[.$U386];[$JSON.$P$1];IF(ISNA([.$W386]);&quot;null&quot;;[.$W386]);[$JSON.$Q$1];[.$Y386];[$JSON.$R$1];IF([.$Z386];&quot;true&quot;;&quot;false&quot;);[$JSON.$S$1];[.$A386];[$JSON.$T$1];[.$B386];[$JSON.$U$1])" office:value-type="string" office:string-value="{&quot;id&quot;:&quot;4-76&quot;,&quot;name&quot;:&quot;トランスポーター&quot;,&quot;displayName&quot;:&quot;トランスポーター&quot;,&quot;kana&quot;:&quot;とらんすぽーた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rarity&quot;:1,&quot;type&quot;:4,&quot;level&quot;:1,&quot;color&quot;:64,&quot;term&quot;:0,&quot;trait&quot;:0,&quot;power&quot;:null,&quot;legacy&quot;:4,&quot;anyNumCopies&quot;:false,&quot;orderTable&quot;:385,&quot;orderDeck&quot;:474}," calcext:value-type="string">
            <text:p>{"id":"4-76","name":"トランスポーター","displayName":"トランスポーター","kana":"とらんすぽーた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rarity":1,"type":4,"level":1,"color":64,"term":0,"trait":0,"power":null,"legacy":4,"anyNumCopies":false,"orderTable":385,"orderDeck":474},</text:p>
          </table:table-cell>
          <table:table-cell table:number-columns-repeated="16356"/>
        </table:table-row>
        <table:table-row table:style-name="ro2">
          <table:table-cell table:style-name="ce11" office:value-type="float" office:value="386" calcext:value-type="float">
            <text:p>386</text:p>
          </table:table-cell>
          <table:table-cell table:style-name="ce11" office:value-type="float" office:value="491" calcext:value-type="float">
            <text:p>491</text:p>
          </table:table-cell>
          <table:table-cell table:style-name="ce21" office:value-type="string" calcext:value-type="string">
            <text:p>4-77</text:p>
          </table:table-cell>
          <table:table-cell table:style-name="ce21" office:value-type="float" office:value="77" calcext:value-type="float">
            <text:p>77</text:p>
          </table:table-cell>
          <table:table-cell table:style-name="ce11" office:value-type="string" calcext:value-type="string">
            <text:p>アセイミー</text:p>
          </table:table-cell>
          <table:table-cell table:style-name="ce11" table:formula="of:=[.E387]" office:value-type="string" office:string-value="アセイミー" calcext:value-type="string">
            <text:p>アセイミー</text:p>
          </table:table-cell>
          <table:table-cell table:style-name="ce11" office:value-type="string" calcext:value-type="string">
            <text:p>あせいみー</text:p>
          </table:table-cell>
          <table:table-cell table:style-name="ce11" office:value-type="string" calcext:value-type="string">
            <text:p>第４弾ブースターパック</text:p>
          </table:table-cell>
          <table:table-cell table:style-name="ce11" table:formula="of:=VLOOKUP([.H387];[$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87];[$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87];[$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7];[$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87];[$特性番号.$A$1:$特性番号.$B$8];2;0);0)" office:value-type="float" office:value="0" calcext:value-type="float">
            <text:p>0</text:p>
          </table:table-cell>
          <table:table-cell table:style-name="ce11"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7];[$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7.png</text:p>
          </table:table-cell>
          <table:table-cell table:style-name="ce11" table:formula="of:=CONCATENATE([$JSON.$A$1];[.$C387];[$JSON.$B$1];[.$E387];[$JSON.$C$1];[.F387];[$JSON.$D$1];[.$G387];[$JSON.$E$1];IF(ISNA([.$T387]);&quot;null&quot;;&quot;&quot;&quot;&quot;&amp;[.$T387]&amp;&quot;&quot;&quot;&quot;);[$JSON.$F$1];[.$V387];[$JSON.$G$1];IF(ISNA([.$X387]);&quot;null&quot;;&quot;&quot;&quot;&quot;&amp;[.$X387]&amp;&quot;&quot;&quot;&quot;);[$JSON.$H$1];[.$AA387];[$JSON.$I$1];[.$I387];[$JSON.$J$1];[.K387];[$JSON.$K$1];[.$M387];[$JSON.$L$1];[.$P387];[$JSON.$M$1];[.$O387];[$JSON.$N$1];[.$S387];[$JSON.$O$1];[.$U387];[$JSON.$P$1];IF(ISNA([.$W387]);&quot;null&quot;;[.$W387]);[$JSON.$Q$1];[.$Y387];[$JSON.$R$1];IF([.$Z387];&quot;true&quot;;&quot;false&quot;);[$JSON.$S$1];[.$A387];[$JSON.$T$1];[.$B387];[$JSON.$U$1])" office:value-type="string" office:string-value="{&quot;id&quot;:&quot;4-77&quot;,&quot;name&quot;:&quot;アセイミー&quot;,&quot;displayName&quot;:&quot;アセイミー&quot;,&quot;kana&quot;:&quot;あせいみ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rarity&quot;:2,&quot;type&quot;:4,&quot;level&quot;:2,&quot;color&quot;:64,&quot;term&quot;:0,&quot;trait&quot;:0,&quot;power&quot;:null,&quot;legacy&quot;:3,&quot;anyNumCopies&quot;:false,&quot;orderTable&quot;:386,&quot;orderDeck&quot;:491}," calcext:value-type="string">
            <text:p>{"id":"4-77","name":"アセイミー","displayName":"アセイミー","kana":"あせいみ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rarity":2,"type":4,"level":2,"color":64,"term":0,"trait":0,"power":null,"legacy":3,"anyNumCopies":false,"orderTable":386,"orderDeck":491},</text:p>
          </table:table-cell>
          <table:table-cell table:number-columns-repeated="16356"/>
        </table:table-row>
        <table:table-row table:style-name="ro2">
          <table:table-cell table:style-name="ce11" office:value-type="float" office:value="387" calcext:value-type="float">
            <text:p>387</text:p>
          </table:table-cell>
          <table:table-cell table:style-name="ce11" office:value-type="float" office:value="492" calcext:value-type="float">
            <text:p>492</text:p>
          </table:table-cell>
          <table:table-cell table:style-name="ce21" office:value-type="string" calcext:value-type="string">
            <text:p>4-78</text:p>
          </table:table-cell>
          <table:table-cell table:style-name="ce21" office:value-type="float" office:value="78" calcext:value-type="float">
            <text:p>78</text:p>
          </table:table-cell>
          <table:table-cell table:style-name="ce11" office:value-type="string" calcext:value-type="string">
            <text:p>ホプロン</text:p>
          </table:table-cell>
          <table:table-cell table:style-name="ce11" table:formula="of:=[.E388]" office:value-type="string" office:string-value="ホプロン" calcext:value-type="string">
            <text:p>ホプロン</text:p>
          </table:table-cell>
          <table:table-cell table:style-name="ce11" office:value-type="string" calcext:value-type="string">
            <text:p>ほぷろん</text:p>
          </table:table-cell>
          <table:table-cell table:style-name="ce11" office:value-type="string" calcext:value-type="string">
            <text:p>第４弾ブースターパック</text:p>
          </table:table-cell>
          <table:table-cell table:style-name="ce11" table:formula="of:=VLOOKUP([.H388];[$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88];[$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8];[$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8];[$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88];[$特性番号.$A$1:$特性番号.$B$8];2;0);0)" office:value-type="float" office:value="0" calcext:value-type="float">
            <text:p>0</text:p>
          </table:table-cell>
          <table:table-cell table:style-name="ce11"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style-name="ce11" table:formula="of:=NA()" office:value-type="string" office:string-value="" calcext:value-type="error">
            <text:p>#N/A</text:p>
          </table:table-cell>
          <table:table-cell table:style-name="ce25" office:value-type="string" calcext:value-type="string">
            <text:p>復元</text:p>
          </table:table-cell>
          <table:table-cell table:style-name="ce11" table:formula="of:=IFERROR(VLOOKUP([.$X388];[$遺業能力番号.$A$1:$遺業能力番号.$B$9];2;0);0)" office:value-type="float" office:value="3" calcext:value-type="float">
            <text:p>3</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8.png</text:p>
          </table:table-cell>
          <table:table-cell table:style-name="ce11" table:formula="of:=CONCATENATE([$JSON.$A$1];[.$C388];[$JSON.$B$1];[.$E388];[$JSON.$C$1];[.F388];[$JSON.$D$1];[.$G388];[$JSON.$E$1];IF(ISNA([.$T388]);&quot;null&quot;;&quot;&quot;&quot;&quot;&amp;[.$T388]&amp;&quot;&quot;&quot;&quot;);[$JSON.$F$1];[.$V388];[$JSON.$G$1];IF(ISNA([.$X388]);&quot;null&quot;;&quot;&quot;&quot;&quot;&amp;[.$X388]&amp;&quot;&quot;&quot;&quot;);[$JSON.$H$1];[.$AA388];[$JSON.$I$1];[.$I388];[$JSON.$J$1];[.K388];[$JSON.$K$1];[.$M388];[$JSON.$L$1];[.$P388];[$JSON.$M$1];[.$O388];[$JSON.$N$1];[.$S388];[$JSON.$O$1];[.$U388];[$JSON.$P$1];IF(ISNA([.$W388]);&quot;null&quot;;[.$W388]);[$JSON.$Q$1];[.$Y388];[$JSON.$R$1];IF([.$Z388];&quot;true&quot;;&quot;false&quot;);[$JSON.$S$1];[.$A388];[$JSON.$T$1];[.$B388];[$JSON.$U$1])" office:value-type="string" office:string-value="{&quot;id&quot;:&quot;4-78&quot;,&quot;name&quot;:&quot;ホプロン&quot;,&quot;displayName&quot;:&quot;ホプロン&quot;,&quot;kana&quot;:&quot;ほぷろん&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rarity&quot;:1,&quot;type&quot;:4,&quot;level&quot;:2,&quot;color&quot;:64,&quot;term&quot;:0,&quot;trait&quot;:0,&quot;power&quot;:null,&quot;legacy&quot;:3,&quot;anyNumCopies&quot;:false,&quot;orderTable&quot;:387,&quot;orderDeck&quot;:492}," calcext:value-type="string">
            <text:p>{"id":"4-78","name":"ホプロン","displayName":"ホプロン","kana":"ほぷろん","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rarity":1,"type":4,"level":2,"color":64,"term":0,"trait":0,"power":null,"legacy":3,"anyNumCopies":false,"orderTable":387,"orderDeck":492},</text:p>
          </table:table-cell>
          <table:table-cell table:number-columns-repeated="16356"/>
        </table:table-row>
        <table:table-row table:style-name="ro2">
          <table:table-cell table:style-name="ce11" office:value-type="float" office:value="388" calcext:value-type="float">
            <text:p>388</text:p>
          </table:table-cell>
          <table:table-cell table:style-name="ce11" office:value-type="float" office:value="475" calcext:value-type="float">
            <text:p>475</text:p>
          </table:table-cell>
          <table:table-cell table:style-name="ce21" office:value-type="string" calcext:value-type="string">
            <text:p>4-79</text:p>
          </table:table-cell>
          <table:table-cell table:style-name="ce21" office:value-type="float" office:value="79" calcext:value-type="float">
            <text:p>79</text:p>
          </table:table-cell>
          <table:table-cell table:style-name="ce11" office:value-type="string" calcext:value-type="string">
            <text:p>ピクシーダスト</text:p>
          </table:table-cell>
          <table:table-cell table:style-name="ce11" table:formula="of:=[.E389]" office:value-type="string" office:string-value="ピクシーダスト" calcext:value-type="string">
            <text:p>ピクシーダスト</text:p>
          </table:table-cell>
          <table:table-cell table:style-name="ce11" office:value-type="string" calcext:value-type="string">
            <text:p>ぴくしーだすと</text:p>
          </table:table-cell>
          <table:table-cell table:style-name="ce11" office:value-type="string" calcext:value-type="string">
            <text:p>第４弾ブースターパック</text:p>
          </table:table-cell>
          <table:table-cell table:style-name="ce11" table:formula="of:=VLOOKUP([.H389];[$収録番号.$A$1:$収録番号.$B$10];2;0)" office:value-type="float" office:value="45" calcext:value-type="float">
            <text:p>45</text:p>
          </table:table-cell>
          <table:table-cell table:style-name="ce11" office:value-type="string" calcext:value-type="string">
            <text:p>N</text:p>
          </table:table-cell>
          <table:table-cell table:style-name="ce11" table:formula="of:=VLOOKUP([.J389];[$レアリティ番号.$A$1:$レアリティ番号.$B$4];2;0)" office:value-type="float" office:value="1" calcext:value-type="float">
            <text:p>1</text:p>
          </table:table-cell>
          <table:table-cell table:style-name="ce11" office:value-type="string" calcext:value-type="string">
            <text:p>マリョク</text:p>
          </table:table-cell>
          <table:table-cell table:style-name="ce11" table:formula="of:=VLOOKUP([.L389];[$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89];[$色番号.$A$1:$色番号.$B$10];2;0)" office:value-type="float" office:value="64" calcext:value-type="float">
            <text:p>64</text:p>
          </table:table-cell>
          <table:table-cell table:style-name="ce11"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8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89];[$特性番号.$A$1:$特性番号.$B$8];2;0);0)" office:value-type="float" office:value="0" calcext:value-type="float">
            <text:p>0</text:p>
          </table:table-cell>
          <table:table-cell table:style-name="ce11"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89];[$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79.png</text:p>
          </table:table-cell>
          <table:table-cell table:style-name="ce11" table:formula="of:=CONCATENATE([$JSON.$A$1];[.$C389];[$JSON.$B$1];[.$E389];[$JSON.$C$1];[.F389];[$JSON.$D$1];[.$G389];[$JSON.$E$1];IF(ISNA([.$T389]);&quot;null&quot;;&quot;&quot;&quot;&quot;&amp;[.$T389]&amp;&quot;&quot;&quot;&quot;);[$JSON.$F$1];[.$V389];[$JSON.$G$1];IF(ISNA([.$X389]);&quot;null&quot;;&quot;&quot;&quot;&quot;&amp;[.$X389]&amp;&quot;&quot;&quot;&quot;);[$JSON.$H$1];[.$AA389];[$JSON.$I$1];[.$I389];[$JSON.$J$1];[.K389];[$JSON.$K$1];[.$M389];[$JSON.$L$1];[.$P389];[$JSON.$M$1];[.$O389];[$JSON.$N$1];[.$S389];[$JSON.$O$1];[.$U389];[$JSON.$P$1];IF(ISNA([.$W389]);&quot;null&quot;;[.$W389]);[$JSON.$Q$1];[.$Y389];[$JSON.$R$1];IF([.$Z389];&quot;true&quot;;&quot;false&quot;);[$JSON.$S$1];[.$A389];[$JSON.$T$1];[.$B389];[$JSON.$U$1])" office:value-type="string" office:string-value="{&quot;id&quot;:&quot;4-79&quot;,&quot;name&quot;:&quot;ピクシーダスト&quot;,&quot;displayName&quot;:&quot;ピクシーダスト&quot;,&quot;kana&quot;:&quot;ぴくしーだすと&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rarity&quot;:1,&quot;type&quot;:4,&quot;level&quot;:1,&quot;color&quot;:64,&quot;term&quot;:0,&quot;trait&quot;:0,&quot;power&quot;:null,&quot;legacy&quot;:1,&quot;anyNumCopies&quot;:false,&quot;orderTable&quot;:388,&quot;orderDeck&quot;:475}," calcext:value-type="string">
            <text:p>{"id":"4-79","name":"ピクシーダスト","displayName":"ピクシーダスト","kana":"ぴくしーだすと","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rarity":1,"type":4,"level":1,"color":64,"term":0,"trait":0,"power":null,"legacy":1,"anyNumCopies":false,"orderTable":388,"orderDeck":475},</text:p>
          </table:table-cell>
          <table:table-cell table:number-columns-repeated="16356"/>
        </table:table-row>
        <table:table-row table:style-name="ro2">
          <table:table-cell table:style-name="ce11" office:value-type="float" office:value="389" calcext:value-type="float">
            <text:p>389</text:p>
          </table:table-cell>
          <table:table-cell table:style-name="ce11" office:value-type="float" office:value="493" calcext:value-type="float">
            <text:p>493</text:p>
          </table:table-cell>
          <table:table-cell table:style-name="ce21" office:value-type="string" calcext:value-type="string">
            <text:p>4-80</text:p>
          </table:table-cell>
          <table:table-cell table:style-name="ce21" office:value-type="float" office:value="80" calcext:value-type="float">
            <text:p>80</text:p>
          </table:table-cell>
          <table:table-cell table:style-name="ce11" office:value-type="string" calcext:value-type="string">
            <text:p>カルドロン</text:p>
          </table:table-cell>
          <table:table-cell table:style-name="ce11" table:formula="of:=[.E390]" office:value-type="string" office:string-value="カルドロン" calcext:value-type="string">
            <text:p>カルドロン</text:p>
          </table:table-cell>
          <table:table-cell table:style-name="ce11" office:value-type="string" calcext:value-type="string">
            <text:p>かるどろん</text:p>
          </table:table-cell>
          <table:table-cell table:style-name="ce11" office:value-type="string" calcext:value-type="string">
            <text:p>第４弾ブースターパック</text:p>
          </table:table-cell>
          <table:table-cell table:style-name="ce11" table:formula="of:=VLOOKUP([.H390];[$収録番号.$A$1:$収録番号.$B$10];2;0)" office:value-type="float" office:value="45" calcext:value-type="float">
            <text:p>45</text:p>
          </table:table-cell>
          <table:table-cell table:style-name="ce11" office:value-type="string" calcext:value-type="string">
            <text:p>R</text:p>
          </table:table-cell>
          <table:table-cell table:style-name="ce11" table:formula="of:=VLOOKUP([.J390];[$レアリティ番号.$A$1:$レアリティ番号.$B$4];2;0)" office:value-type="float" office:value="2" calcext:value-type="float">
            <text:p>2</text:p>
          </table:table-cell>
          <table:table-cell table:style-name="ce11" office:value-type="string" calcext:value-type="string">
            <text:p>マリョク</text:p>
          </table:table-cell>
          <table:table-cell table:style-name="ce11" table:formula="of:=VLOOKUP([.L390];[$種類番号.$A$1:$種類番号.$B$4];2;0)" office:value-type="float" office:value="4" calcext:value-type="float">
            <text:p>4</text:p>
          </table:table-cell>
          <table:table-cell table:style-name="ce11" office:value-type="string" calcext:value-type="string">
            <text:p>無色</text:p>
          </table:table-cell>
          <table:table-cell table:style-name="ce11" table:formula="of:=VLOOKUP([.N390];[$色番号.$A$1:$色番号.$B$10];2;0)" office:value-type="float" office:value="64" calcext:value-type="float">
            <text:p>64</text:p>
          </table:table-cell>
          <table:table-cell table:style-name="ce11"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90];[$特性番号.$A$1:$特性番号.$B$8];2;0);0)" office:value-type="float" office:value="0" calcext:value-type="float">
            <text:p>0</text:p>
          </table:table-cell>
          <table:table-cell table:style-name="ce11"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style-name="ce11" table:formula="of:=NA()" office:value-type="string" office:string-value="" calcext:value-type="error">
            <text:p>#N/A</text:p>
          </table:table-cell>
          <table:table-cell table:style-name="ce25" office:value-type="string" calcext:value-type="string">
            <text:p>魔力化</text:p>
          </table:table-cell>
          <table:table-cell table:style-name="ce11" table:formula="of:=IFERROR(VLOOKUP([.$X390];[$遺業能力番号.$A$1:$遺業能力番号.$B$9];2;0);0)" office:value-type="float" office:value="1" calcext:value-type="float">
            <text:p>1</text:p>
          </table:table-cell>
          <table:table-cell table:style-name="ce28" office:value-type="boolean" office:boolean-value="false" calcext:value-type="boolean">
            <text:p>FALSE</text:p>
          </table:table-cell>
          <table:table-cell table:style-name="ce11" office:value-type="string" calcext:value-type="string">
            <text:p>https://one-draw.jp/ijinden/cardlist/004/card/04_080.png</text:p>
          </table:table-cell>
          <table:table-cell table:style-name="ce11" table:formula="of:=CONCATENATE([$JSON.$A$1];[.$C390];[$JSON.$B$1];[.$E390];[$JSON.$C$1];[.F390];[$JSON.$D$1];[.$G390];[$JSON.$E$1];IF(ISNA([.$T390]);&quot;null&quot;;&quot;&quot;&quot;&quot;&amp;[.$T390]&amp;&quot;&quot;&quot;&quot;);[$JSON.$F$1];[.$V390];[$JSON.$G$1];IF(ISNA([.$X390]);&quot;null&quot;;&quot;&quot;&quot;&quot;&amp;[.$X390]&amp;&quot;&quot;&quot;&quot;);[$JSON.$H$1];[.$AA390];[$JSON.$I$1];[.$I390];[$JSON.$J$1];[.K390];[$JSON.$K$1];[.$M390];[$JSON.$L$1];[.$P390];[$JSON.$M$1];[.$O390];[$JSON.$N$1];[.$S390];[$JSON.$O$1];[.$U390];[$JSON.$P$1];IF(ISNA([.$W390]);&quot;null&quot;;[.$W390]);[$JSON.$Q$1];[.$Y390];[$JSON.$R$1];IF([.$Z390];&quot;true&quot;;&quot;false&quot;);[$JSON.$S$1];[.$A390];[$JSON.$T$1];[.$B390];[$JSON.$U$1])" office:value-type="string" office:string-value="{&quot;id&quot;:&quot;4-80&quot;,&quot;name&quot;:&quot;カルドロン&quot;,&quot;displayName&quot;:&quot;カルドロン&quot;,&quot;kana&quot;:&quot;かるどろん&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rarity&quot;:2,&quot;type&quot;:4,&quot;level&quot;:2,&quot;color&quot;:64,&quot;term&quot;:0,&quot;trait&quot;:0,&quot;power&quot;:null,&quot;legacy&quot;:1,&quot;anyNumCopies&quot;:false,&quot;orderTable&quot;:389,&quot;orderDeck&quot;:493}," calcext:value-type="string">
            <text:p>{"id":"4-80","name":"カルドロン","displayName":"カルドロン","kana":"かるどろん","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rarity":2,"type":4,"level":2,"color":64,"term":0,"trait":0,"power":null,"legacy":1,"anyNumCopies":false,"orderTable":389,"orderDeck":493},</text:p>
          </table:table-cell>
          <table:table-cell table:number-columns-repeated="16356"/>
        </table:table-row>
        <table:table-row table:style-name="ro2">
          <table:table-cell table:style-name="ce11" office:value-type="float" office:value="390" calcext:value-type="float">
            <text:p>390</text:p>
          </table:table-cell>
          <table:table-cell table:style-name="ce11" office:value-type="float" office:value="298" calcext:value-type="float">
            <text:p>298</text:p>
          </table:table-cell>
          <table:table-cell table:style-name="ce21" office:value-type="string" calcext:value-type="string">
            <text:p>4-81</text:p>
          </table:table-cell>
          <table:table-cell table:style-name="ce21" office:value-type="float" office:value="81" calcext:value-type="float">
            <text:p>81</text:p>
          </table:table-cell>
          <table:table-cell table:style-name="ce11" office:value-type="string" calcext:value-type="string">
            <text:p>カール大帝</text:p>
          </table:table-cell>
          <table:table-cell table:style-name="ce11" office:value-type="string" calcext:value-type="string">
            <text:p>カール大帝 (PSR)</text:p>
          </table:table-cell>
          <table:table-cell table:style-name="ce11" office:value-type="string" calcext:value-type="string">
            <text:p>かーるたいてい</text:p>
          </table:table-cell>
          <table:table-cell table:style-name="ce11" office:value-type="string" calcext:value-type="string">
            <text:p>第４弾ブースターパック</text:p>
          </table:table-cell>
          <table:table-cell table:style-name="ce11" table:formula="of:=VLOOKUP([.H391];[$収録番号.$A$1:$収録番号.$B$10];2;0)" office:value-type="float" office:value="45" calcext:value-type="float">
            <text:p>45</text:p>
          </table:table-cell>
          <table:table-cell table:style-name="ce11" office:value-type="string" calcext:value-type="string">
            <text:p>PSR</text:p>
          </table:table-cell>
          <table:table-cell table:style-name="ce11" table:formula="of:=VLOOKUP([.J391];[$レアリティ番号.$A$1:$レアリティ番号.$B$4];2;0)" office:value-type="float" office:value="8" calcext:value-type="float">
            <text:p>8</text:p>
          </table:table-cell>
          <table:table-cell table:style-name="ce11" office:value-type="string" calcext:value-type="string">
            <text:p>イジン</text:p>
          </table:table-cell>
          <table:table-cell table:style-name="ce11" table:formula="of:=VLOOKUP([.L391];[$種類番号.$A$1:$種類番号.$B$4];2;0)" office:value-type="float" office:value="1" calcext:value-type="float">
            <text:p>1</text:p>
          </table:table-cell>
          <table:table-cell table:style-name="ce11" office:value-type="string" calcext:value-type="string">
            <text:p>紫</text:p>
          </table:table-cell>
          <table:table-cell table:style-name="ce11" table:formula="of:=VLOOKUP([.N391];[$色番号.$A$1:$色番号.$B$10];2;0)" office:value-type="float" office:value="16" calcext:value-type="float">
            <text:p>16</text:p>
          </table:table-cell>
          <table:table-cell table:style-name="ce11" office:value-type="float" office:value="10" calcext:value-type="float">
            <text:p>10</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91];[$特性番号.$A$1:$特性番号.$B$8];2;0);0)" office:value-type="float" office:value="0" calcext:value-type="float">
            <text:p>0</text:p>
          </table:table-cell>
          <table:table-cell table:style-name="ce11"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table:style-name="ce11"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391];[$遺業能力番号.$A$1:$遺業能力番号.$B$9];2;0);0)" office:value-type="float" office:value="0" calcext:value-type="float">
            <text:p>0</text:p>
          </table:table-cell>
          <table:table-cell table:style-name="ce28" office:value-type="boolean" office:boolean-value="false" calcext:value-type="boolean">
            <text:p>FALSE</text:p>
          </table:table-cell>
          <table:table-cell table:style-name="ce11" office:value-type="string" calcext:value-type="string">
            <text:p><text:a xlink:href="https://one-draw.jp/ijinden/cardlist/004/card/04_081" xlink:type="simple">https://one-draw.jp/ijinden/cardlist/004/card/04_081</text:a>.png</text:p>
          </table:table-cell>
          <table:table-cell table:style-name="ce11" table:formula="of:=CONCATENATE([$JSON.$A$1];[.$C391];[$JSON.$B$1];[.$E391];[$JSON.$C$1];[.F391];[$JSON.$D$1];[.$G391];[$JSON.$E$1];IF(ISNA([.$T391]);&quot;null&quot;;&quot;&quot;&quot;&quot;&amp;[.$T391]&amp;&quot;&quot;&quot;&quot;);[$JSON.$F$1];[.$V391];[$JSON.$G$1];IF(ISNA([.$X391]);&quot;null&quot;;&quot;&quot;&quot;&quot;&amp;[.$X391]&amp;&quot;&quot;&quot;&quot;);[$JSON.$H$1];[.$AA391];[$JSON.$I$1];[.$I391];[$JSON.$J$1];[.K391];[$JSON.$K$1];[.$M391];[$JSON.$L$1];[.$P391];[$JSON.$M$1];[.$O391];[$JSON.$N$1];[.$S391];[$JSON.$O$1];[.$U391];[$JSON.$P$1];IF(ISNA([.$W391]);&quot;null&quot;;[.$W391]);[$JSON.$Q$1];[.$Y391];[$JSON.$R$1];IF([.$Z391];&quot;true&quot;;&quot;false&quot;);[$JSON.$S$1];[.$A391];[$JSON.$T$1];[.$B391];[$JSON.$U$1])" office:value-type="string" office:string-value="{&quot;id&quot;:&quot;4-81&quot;,&quot;name&quot;:&quot;カール大帝&quot;,&quot;displayName&quot;:&quot;カール大帝 (PSR)&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81.png&quot;,&quot;expansion&quot;:45,&quot;rarity&quot;:8,&quot;type&quot;:1,&quot;level&quot;:10,&quot;color&quot;:16,&quot;term&quot;:0,&quot;trait&quot;:0,&quot;power&quot;:5000,&quot;legacy&quot;:0,&quot;anyNumCopies&quot;:false,&quot;orderTable&quot;:390,&quot;orderDeck&quot;:298}," calcext:value-type="string">
            <text:p>{"id":"4-81","name":"カール大帝","displayName":"カール大帝 (PSR)","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81.png","expansion":45,"rarity":8,"type":1,"level":10,"color":16,"term":0,"trait":0,"power":5000,"legacy":0,"anyNumCopies":false,"orderTable":390,"orderDeck":298},</text:p>
          </table:table-cell>
          <table:table-cell table:style-name="ce11" table:number-columns-repeated="16356"/>
        </table:table-row>
        <table:table-row table:style-name="ro2">
          <table:table-cell table:style-name="ce11" office:value-type="float" office:value="391" calcext:value-type="float">
            <text:p>391</text:p>
          </table:table-cell>
          <table:table-cell table:style-name="ce11" office:value-type="float" office:value="192" calcext:value-type="float">
            <text:p>192</text:p>
          </table:table-cell>
          <table:table-cell table:formula="of:=CONCATENATE(&quot;2nd1-&quot;;TEXT([.D392];&quot;0&quot;))" office:value-type="string" office:string-value="2nd1-1" calcext:value-type="string">
            <text:p>2nd1-1</text:p>
          </table:table-cell>
          <table:table-cell office:value-type="float" office:value="1" calcext:value-type="float">
            <text:p>1</text:p>
          </table:table-cell>
          <table:table-cell office:value-type="string" calcext:value-type="string">
            <text:p>武田信玄</text:p>
          </table:table-cell>
          <table:table-cell table:style-name="ce11" table:formula="of:=[.E392]" office:value-type="string" office:string-value="武田信玄" calcext:value-type="string">
            <text:p>武田信玄</text:p>
          </table:table-cell>
          <table:table-cell office:value-type="string" calcext:value-type="string">
            <text:p>たけだしんげん</text:p>
          </table:table-cell>
          <table:table-cell table:style-name="ce11" office:value-type="string" calcext:value-type="string">
            <text:p>第５弾ブースターパック</text:p>
          </table:table-cell>
          <table:table-cell table:style-name="ce11" table:formula="of:=VLOOKUP([.H392];[$収録番号.$A$1:$収録番号.$B$10];2;0)" office:value-type="float" office:value="55" calcext:value-type="float">
            <text:p>55</text:p>
          </table:table-cell>
          <table:table-cell office:value-type="string" calcext:value-type="string">
            <text:p>SR</text:p>
          </table:table-cell>
          <table:table-cell table:style-name="ce11" table:formula="of:=VLOOKUP([.J392];[$レアリティ番号.$A$1:$レアリティ番号.$B$4];2;0)" office:value-type="float" office:value="4" calcext:value-type="float">
            <text:p>4</text:p>
          </table:table-cell>
          <table:table-cell office:value-type="string" calcext:value-type="string">
            <text:p>イジン</text:p>
          </table:table-cell>
          <table:table-cell table:style-name="ce11" table:formula="of:=VLOOKUP([.L392];[$種類番号.$A$1:$種類番号.$B$4];2;0)" office:value-type="float" office:value="1" calcext:value-type="float">
            <text:p>1</text:p>
          </table:table-cell>
          <table:table-cell office:value-type="string" calcext:value-type="string">
            <text:p>赤</text:p>
          </table:table-cell>
          <table:table-cell table:style-name="ce11" table:formula="of:=VLOOKUP([.N392];[$色番号.$A$1:$色番号.$B$10];2;0)" office:value-type="float" office:value="1" calcext:value-type="float">
            <text:p>1</text:p>
          </table:table-cell>
          <table:table-cell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2];[$能力語番号.$A$1:$能力語番号.$B$11];2;0);0)" office:value-type="float" office:value="0" calcext:value-type="float">
            <text:p>0</text:p>
          </table:table-cell>
          <table:table-cell office:value-type="string" calcext:value-type="string">
            <text:p>剣術</text:p>
          </table:table-cell>
          <table:table-cell table:style-name="ce11" table:formula="of:=IFERROR(VLOOKUP([.$T392];[$特性番号.$A$1:$特性番号.$B$8];2;0);0)" office:value-type="float" office:value="1" calcext:value-type="float">
            <text:p>1</text:p>
          </table:table-cell>
          <table:table-cell office:value-type="string" calcext:value-type="string">
            <text:p>この能力は、自分の戦場に「勝鬨」を持つイジンが2体以上いるなら、戦場で効果を発揮する。これは「クアドラプルプレッシャー」を得る。¶アタック+6000</text:p>
          </table:table-cell>
          <table:table-cell office:value-type="float" office:value="4000" calcext:value-type="float">
            <text:p>4000</text:p>
          </table:table-cell>
          <table:table-cell office:value-type="string" calcext:value-type="string">
            <text:p>1ドローする</text:p>
          </table:table-cell>
          <table:table-cell table:style-name="ce11" table:formula="of:=IFERROR(VLOOKUP([.$X392];[$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01.png</text:p>
          </table:table-cell>
          <table:table-cell table:style-name="ce11" table:formula="of:=CONCATENATE([$JSON.$A$1];[.$C392];[$JSON.$B$1];[.$E392];[$JSON.$C$1];[.F392];[$JSON.$D$1];[.$G392];[$JSON.$E$1];IF(ISNA([.$T392]);&quot;null&quot;;&quot;&quot;&quot;&quot;&amp;[.$T392]&amp;&quot;&quot;&quot;&quot;);[$JSON.$F$1];[.$V392];[$JSON.$G$1];IF(ISNA([.$X392]);&quot;null&quot;;&quot;&quot;&quot;&quot;&amp;[.$X392]&amp;&quot;&quot;&quot;&quot;);[$JSON.$H$1];[.$AA392];[$JSON.$I$1];[.$I392];[$JSON.$J$1];[.K392];[$JSON.$K$1];[.$M392];[$JSON.$L$1];[.$P392];[$JSON.$M$1];[.$O392];[$JSON.$N$1];[.$S392];[$JSON.$O$1];[.$U392];[$JSON.$P$1];IF(ISNA([.$W392]);&quot;null&quot;;[.$W392]);[$JSON.$Q$1];[.$Y392];[$JSON.$R$1];IF([.$Z392];&quot;true&quot;;&quot;false&quot;);[$JSON.$S$1];[.$A392];[$JSON.$T$1];[.$B392];[$JSON.$U$1])" office:value-type="string" office:string-value="{&quot;id&quot;:&quot;2nd1-1&quot;,&quot;name&quot;:&quot;武田信玄&quot;,&quot;displayName&quot;:&quot;武田信玄&quot;,&quot;kana&quot;:&quot;たけだしんげん&quot;,&quot;traitText&quot;:&quot;剣術&quot;,&quot;ruleText&quot;:&quot;この能力は、自分の戦場に「勝鬨」を持つイジンが2体以上いるなら、戦場で効果を発揮する。これは「クアドラプルプレッシャー」を得る。¶アタック+6000&quot;,&quot;legacyText&quot;:&quot;1ドローする&quot;,&quot;imageUrl&quot;:&quot;https://one-draw.jp/ijinden/cardlist/005/card/05_001.png&quot;,&quot;expansion&quot;:55,&quot;rarity&quot;:4,&quot;type&quot;:1,&quot;level&quot;:5,&quot;color&quot;:1,&quot;term&quot;:0,&quot;trait&quot;:1,&quot;power&quot;:4000,&quot;legacy&quot;:4,&quot;anyNumCopies&quot;:false,&quot;orderTable&quot;:391,&quot;orderDeck&quot;:192}," calcext:value-type="string">
            <text:p>{"id":"2nd1-1","name":"武田信玄","displayName":"武田信玄","kana":"たけだしんげん","traitText":"剣術","ruleText":"この能力は、自分の戦場に「勝鬨」を持つイジンが2体以上いるなら、戦場で効果を発揮する。これは「クアドラプルプレッシャー」を得る。¶アタック+6000","legacyText":"1ドローする","imageUrl":"https://one-draw.jp/ijinden/cardlist/005/card/05_001.png","expansion":55,"rarity":4,"type":1,"level":5,"color":1,"term":0,"trait":1,"power":4000,"legacy":4,"anyNumCopies":false,"orderTable":391,"orderDeck":192},</text:p>
          </table:table-cell>
          <table:table-cell table:number-columns-repeated="16356"/>
        </table:table-row>
        <table:table-row table:style-name="ro2">
          <table:table-cell table:style-name="ce11" office:value-type="float" office:value="392" calcext:value-type="float">
            <text:p>392</text:p>
          </table:table-cell>
          <table:table-cell table:style-name="ce11" office:value-type="float" office:value="92" calcext:value-type="float">
            <text:p>92</text:p>
          </table:table-cell>
          <table:table-cell table:formula="of:=CONCATENATE(&quot;2nd1-&quot;;TEXT([.D393];&quot;0&quot;))" office:value-type="string" office:string-value="2nd1-2" calcext:value-type="string">
            <text:p>2nd1-2</text:p>
          </table:table-cell>
          <table:table-cell office:value-type="float" office:value="2" calcext:value-type="float">
            <text:p>2</text:p>
          </table:table-cell>
          <table:table-cell office:value-type="string" calcext:value-type="string">
            <text:p>ヴィクトリア女王</text:p>
          </table:table-cell>
          <table:table-cell table:style-name="ce11" table:formula="of:=[.E393]" office:value-type="string" office:string-value="ヴィクトリア女王" calcext:value-type="string">
            <text:p>ヴィクトリア女王</text:p>
          </table:table-cell>
          <table:table-cell office:value-type="string" calcext:value-type="string">
            <text:p>ゔぃくとりあじょうおう</text:p>
          </table:table-cell>
          <table:table-cell table:style-name="ce11" office:value-type="string" calcext:value-type="string">
            <text:p>第５弾ブースターパック</text:p>
          </table:table-cell>
          <table:table-cell table:style-name="ce11" table:formula="of:=VLOOKUP([.H393];[$収録番号.$A$1:$収録番号.$B$10];2;0)" office:value-type="float" office:value="55" calcext:value-type="float">
            <text:p>55</text:p>
          </table:table-cell>
          <table:table-cell office:value-type="string" calcext:value-type="string">
            <text:p>SR</text:p>
          </table:table-cell>
          <table:table-cell table:style-name="ce11" table:formula="of:=VLOOKUP([.J393];[$レアリティ番号.$A$1:$レアリティ番号.$B$4];2;0)" office:value-type="float" office:value="4" calcext:value-type="float">
            <text:p>4</text:p>
          </table:table-cell>
          <table:table-cell office:value-type="string" calcext:value-type="string">
            <text:p>イジン</text:p>
          </table:table-cell>
          <table:table-cell table:style-name="ce11" table:formula="of:=VLOOKUP([.L393];[$種類番号.$A$1:$種類番号.$B$4];2;0)" office:value-type="float" office:value="1" calcext:value-type="float">
            <text:p>1</text:p>
          </table:table-cell>
          <table:table-cell office:value-type="string" calcext:value-type="string">
            <text:p>赤</text:p>
          </table:table-cell>
          <table:table-cell table:style-name="ce11" table:formula="of:=VLOOKUP([.N393];[$色番号.$A$1:$色番号.$B$10];2;0)" office:value-type="float" office:value="1" calcext:value-type="float">
            <text:p>1</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93];[$特性番号.$A$1:$特性番号.$B$8];2;0);0)" office:value-type="float" office:value="0" calcext:value-type="float">
            <text:p>0</text:p>
          </table:table-cell>
          <table:table-cell office:value-type="string" calcext:value-type="string">
            <text:p>この能力は、これが戦場に置かれたときに発動できる。次のどちらかの効果を選んで発揮する。¶・相手の戦場のパワー1000以下のイジンすべてを破壊する。¶・相手の戦場のハイケイすべてを破壊する。</text:p>
          </table:table-cell>
          <table:table-cell office:value-type="float" office:value="3000" calcext:value-type="float">
            <text:p>3000</text:p>
          </table:table-cell>
          <table:table-cell office:value-type="string" calcext:value-type="string">
            <text:p>1ドローする</text:p>
          </table:table-cell>
          <table:table-cell table:style-name="ce11" table:formula="of:=IFERROR(VLOOKUP([.$X393];[$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02.png</text:p>
          </table:table-cell>
          <table:table-cell table:style-name="ce11" table:formula="of:=CONCATENATE([$JSON.$A$1];[.$C393];[$JSON.$B$1];[.$E393];[$JSON.$C$1];[.F393];[$JSON.$D$1];[.$G393];[$JSON.$E$1];IF(ISNA([.$T393]);&quot;null&quot;;&quot;&quot;&quot;&quot;&amp;[.$T393]&amp;&quot;&quot;&quot;&quot;);[$JSON.$F$1];[.$V393];[$JSON.$G$1];IF(ISNA([.$X393]);&quot;null&quot;;&quot;&quot;&quot;&quot;&amp;[.$X393]&amp;&quot;&quot;&quot;&quot;);[$JSON.$H$1];[.$AA393];[$JSON.$I$1];[.$I393];[$JSON.$J$1];[.K393];[$JSON.$K$1];[.$M393];[$JSON.$L$1];[.$P393];[$JSON.$M$1];[.$O393];[$JSON.$N$1];[.$S393];[$JSON.$O$1];[.$U393];[$JSON.$P$1];IF(ISNA([.$W393]);&quot;null&quot;;[.$W393]);[$JSON.$Q$1];[.$Y393];[$JSON.$R$1];IF([.$Z393];&quot;true&quot;;&quot;false&quot;);[$JSON.$S$1];[.$A393];[$JSON.$T$1];[.$B393];[$JSON.$U$1])" office:value-type="string" office:string-value="{&quot;id&quot;:&quot;2nd1-2&quot;,&quot;name&quot;:&quot;ヴィクトリア女王&quot;,&quot;displayName&quot;:&quot;ヴィクトリア女王&quot;,&quot;kana&quot;:&quot;ゔぃくとりあじょうおう&quot;,&quot;traitText&quot;:null,&quot;ruleText&quot;:&quot;この能力は、これが戦場に置かれたときに発動できる。次のどちらかの効果を選んで発揮する。¶・相手の戦場のパワー1000以下のイジンすべてを破壊する。¶・相手の戦場のハイケイすべてを破壊する。&quot;,&quot;legacyText&quot;:&quot;1ドローする&quot;,&quot;imageUrl&quot;:&quot;https://one-draw.jp/ijinden/cardlist/005/card/05_002.png&quot;,&quot;expansion&quot;:55,&quot;rarity&quot;:4,&quot;type&quot;:1,&quot;level&quot;:3,&quot;color&quot;:1,&quot;term&quot;:0,&quot;trait&quot;:0,&quot;power&quot;:3000,&quot;legacy&quot;:4,&quot;anyNumCopies&quot;:false,&quot;orderTable&quot;:392,&quot;orderDeck&quot;:92}," calcext:value-type="string">
            <text:p>{"id":"2nd1-2","name":"ヴィクトリア女王","displayName":"ヴィクトリア女王","kana":"ゔぃくとりあじょうおう","traitText":null,"ruleText":"この能力は、これが戦場に置かれたときに発動できる。次のどちらかの効果を選んで発揮する。¶・相手の戦場のパワー1000以下のイジンすべてを破壊する。¶・相手の戦場のハイケイすべてを破壊する。","legacyText":"1ドローする","imageUrl":"https://one-draw.jp/ijinden/cardlist/005/card/05_002.png","expansion":55,"rarity":4,"type":1,"level":3,"color":1,"term":0,"trait":0,"power":3000,"legacy":4,"anyNumCopies":false,"orderTable":392,"orderDeck":92},</text:p>
          </table:table-cell>
          <table:table-cell table:number-columns-repeated="16356"/>
        </table:table-row>
        <table:table-row table:style-name="ro2">
          <table:table-cell table:style-name="ce11" office:value-type="float" office:value="393" calcext:value-type="float">
            <text:p>393</text:p>
          </table:table-cell>
          <table:table-cell table:style-name="ce11" office:value-type="float" office:value="264" calcext:value-type="float">
            <text:p>264</text:p>
          </table:table-cell>
          <table:table-cell table:formula="of:=CONCATENATE(&quot;2nd1-&quot;;TEXT([.D394];&quot;0&quot;))" office:value-type="string" office:string-value="2nd1-3" calcext:value-type="string">
            <text:p>2nd1-3</text:p>
          </table:table-cell>
          <table:table-cell office:value-type="float" office:value="3" calcext:value-type="float">
            <text:p>3</text:p>
          </table:table-cell>
          <table:table-cell office:value-type="string" calcext:value-type="string">
            <text:p>カトリーヌ・ド・メディシス</text:p>
          </table:table-cell>
          <table:table-cell table:style-name="ce11" table:formula="of:=[.E394]" office:value-type="string" office:string-value="カトリーヌ・ド・メディシス" calcext:value-type="string">
            <text:p>カトリーヌ・ド・メディシス</text:p>
          </table:table-cell>
          <table:table-cell office:value-type="string" calcext:value-type="string">
            <text:p>かとりーぬどめでぃしす</text:p>
          </table:table-cell>
          <table:table-cell table:style-name="ce11" office:value-type="string" calcext:value-type="string">
            <text:p>第５弾ブースターパック</text:p>
          </table:table-cell>
          <table:table-cell table:style-name="ce11" table:formula="of:=VLOOKUP([.H394];[$収録番号.$A$1:$収録番号.$B$10];2;0)" office:value-type="float" office:value="55" calcext:value-type="float">
            <text:p>55</text:p>
          </table:table-cell>
          <table:table-cell office:value-type="string" calcext:value-type="string">
            <text:p>SR</text:p>
          </table:table-cell>
          <table:table-cell table:style-name="ce11" table:formula="of:=VLOOKUP([.J394];[$レアリティ番号.$A$1:$レアリティ番号.$B$4];2;0)" office:value-type="float" office:value="4" calcext:value-type="float">
            <text:p>4</text:p>
          </table:table-cell>
          <table:table-cell office:value-type="string" calcext:value-type="string">
            <text:p>イジン</text:p>
          </table:table-cell>
          <table:table-cell table:style-name="ce11" table:formula="of:=VLOOKUP([.L394];[$種類番号.$A$1:$種類番号.$B$4];2;0)" office:value-type="float" office:value="1" calcext:value-type="float">
            <text:p>1</text:p>
          </table:table-cell>
          <table:table-cell office:value-type="string" calcext:value-type="string">
            <text:p>青</text:p>
          </table:table-cell>
          <table:table-cell table:style-name="ce11" table:formula="of:=VLOOKUP([.N394];[$色番号.$A$1:$色番号.$B$10];2;0)" office:value-type="float" office:value="2" calcext:value-type="float">
            <text:p>2</text:p>
          </table:table-cell>
          <table:table-cell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94];[$特性番号.$A$1:$特性番号.$B$8];2;0);0)" office:value-type="float" office:value="0" calcext:value-type="float">
            <text:p>0</text:p>
          </table:table-cell>
          <table:table-cell office:value-type="string" calcext:value-type="string">
            <text:p>この能力は、自分の戦場のイジンが破壊されたときに戦場で発動できる。相手の戦場のガーディアンすべてを寝かせる。</text:p>
          </table:table-cell>
          <table:table-cell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394];[$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03.png</text:p>
          </table:table-cell>
          <table:table-cell table:style-name="ce11" table:formula="of:=CONCATENATE([$JSON.$A$1];[.$C394];[$JSON.$B$1];[.$E394];[$JSON.$C$1];[.F394];[$JSON.$D$1];[.$G394];[$JSON.$E$1];IF(ISNA([.$T394]);&quot;null&quot;;&quot;&quot;&quot;&quot;&amp;[.$T394]&amp;&quot;&quot;&quot;&quot;);[$JSON.$F$1];[.$V394];[$JSON.$G$1];IF(ISNA([.$X394]);&quot;null&quot;;&quot;&quot;&quot;&quot;&amp;[.$X394]&amp;&quot;&quot;&quot;&quot;);[$JSON.$H$1];[.$AA394];[$JSON.$I$1];[.$I394];[$JSON.$J$1];[.K394];[$JSON.$K$1];[.$M394];[$JSON.$L$1];[.$P394];[$JSON.$M$1];[.$O394];[$JSON.$N$1];[.$S394];[$JSON.$O$1];[.$U394];[$JSON.$P$1];IF(ISNA([.$W394]);&quot;null&quot;;[.$W394]);[$JSON.$Q$1];[.$Y394];[$JSON.$R$1];IF([.$Z394];&quot;true&quot;;&quot;false&quot;);[$JSON.$S$1];[.$A394];[$JSON.$T$1];[.$B394];[$JSON.$U$1])" office:value-type="string" office:string-value="{&quot;id&quot;:&quot;2nd1-3&quot;,&quot;name&quot;:&quot;カトリーヌ・ド・メディシス&quot;,&quot;displayName&quot;:&quot;カトリーヌ・ド・メディシス&quot;,&quot;kana&quot;:&quot;かとりーぬどめでぃしす&quot;,&quot;traitText&quot;:null,&quot;ruleText&quot;:&quot;この能力は、自分の戦場のイジンが破壊されたときに戦場で発動できる。相手の戦場のガーディアンすべてを寝かせる。&quot;,&quot;legacyText&quot;:null,&quot;imageUrl&quot;:&quot;https://one-draw.jp/ijinden/cardlist/005/card/05_003.png&quot;,&quot;expansion&quot;:55,&quot;rarity&quot;:4,&quot;type&quot;:1,&quot;level&quot;:7,&quot;color&quot;:2,&quot;term&quot;:0,&quot;trait&quot;:0,&quot;power&quot;:6000,&quot;legacy&quot;:0,&quot;anyNumCopies&quot;:false,&quot;orderTable&quot;:393,&quot;orderDeck&quot;:264}," calcext:value-type="string">
            <text:p>{"id":"2nd1-3","name":"カトリーヌ・ド・メディシス","displayName":"カトリーヌ・ド・メディシス","kana":"かとりーぬどめでぃしす","traitText":null,"ruleText":"この能力は、自分の戦場のイジンが破壊されたときに戦場で発動できる。相手の戦場のガーディアンすべてを寝かせる。","legacyText":null,"imageUrl":"https://one-draw.jp/ijinden/cardlist/005/card/05_003.png","expansion":55,"rarity":4,"type":1,"level":7,"color":2,"term":0,"trait":0,"power":6000,"legacy":0,"anyNumCopies":false,"orderTable":393,"orderDeck":264},</text:p>
          </table:table-cell>
          <table:table-cell table:number-columns-repeated="16356"/>
        </table:table-row>
        <table:table-row table:style-name="ro2">
          <table:table-cell table:style-name="ce11" office:value-type="float" office:value="394" calcext:value-type="float">
            <text:p>394</text:p>
          </table:table-cell>
          <table:table-cell table:style-name="ce11" office:value-type="float" office:value="240" calcext:value-type="float">
            <text:p>240</text:p>
          </table:table-cell>
          <table:table-cell table:formula="of:=CONCATENATE(&quot;2nd1-&quot;;TEXT([.D395];&quot;0&quot;))" office:value-type="string" office:string-value="2nd1-4" calcext:value-type="string">
            <text:p>2nd1-4</text:p>
          </table:table-cell>
          <table:table-cell office:value-type="float" office:value="4" calcext:value-type="float">
            <text:p>4</text:p>
          </table:table-cell>
          <table:table-cell office:value-type="string" calcext:value-type="string">
            <text:p>ティムール</text:p>
          </table:table-cell>
          <table:table-cell table:style-name="ce11" table:formula="of:=[.E395]" office:value-type="string" office:string-value="ティムール" calcext:value-type="string">
            <text:p>ティムール</text:p>
          </table:table-cell>
          <table:table-cell office:value-type="string" calcext:value-type="string">
            <text:p>てぃむーる</text:p>
          </table:table-cell>
          <table:table-cell table:style-name="ce11" office:value-type="string" calcext:value-type="string">
            <text:p>第５弾ブースターパック</text:p>
          </table:table-cell>
          <table:table-cell table:style-name="ce11" table:formula="of:=VLOOKUP([.H395];[$収録番号.$A$1:$収録番号.$B$10];2;0)" office:value-type="float" office:value="55" calcext:value-type="float">
            <text:p>55</text:p>
          </table:table-cell>
          <table:table-cell office:value-type="string" calcext:value-type="string">
            <text:p>SR</text:p>
          </table:table-cell>
          <table:table-cell table:style-name="ce11" table:formula="of:=VLOOKUP([.J395];[$レアリティ番号.$A$1:$レアリティ番号.$B$4];2;0)" office:value-type="float" office:value="4" calcext:value-type="float">
            <text:p>4</text:p>
          </table:table-cell>
          <table:table-cell office:value-type="string" calcext:value-type="string">
            <text:p>イジン</text:p>
          </table:table-cell>
          <table:table-cell table:style-name="ce11" table:formula="of:=VLOOKUP([.L395];[$種類番号.$A$1:$種類番号.$B$4];2;0)" office:value-type="float" office:value="1" calcext:value-type="float">
            <text:p>1</text:p>
          </table:table-cell>
          <table:table-cell office:value-type="string" calcext:value-type="string">
            <text:p>青</text:p>
          </table:table-cell>
          <table:table-cell table:style-name="ce11" table:formula="of:=VLOOKUP([.N395];[$色番号.$A$1:$色番号.$B$10];2;0)" office:value-type="float" office:value="2" calcext:value-type="float">
            <text:p>2</text:p>
          </table:table-cell>
          <table:table-cell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95];[$特性番号.$A$1:$特性番号.$B$8];2;0);0)" office:value-type="float" office:value="0" calcext:value-type="float">
            <text:p>0</text:p>
          </table:table-cell>
          <table:table-cell office:value-type="string" calcext:value-type="string">
            <text:p>トリプルプレッシャー¶これは赤のイジンにも青のイジンにもブロックされない。</text:p>
          </table:table-cell>
          <table:table-cell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395];[$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04.png</text:p>
          </table:table-cell>
          <table:table-cell table:style-name="ce11" table:formula="of:=CONCATENATE([$JSON.$A$1];[.$C395];[$JSON.$B$1];[.$E395];[$JSON.$C$1];[.F395];[$JSON.$D$1];[.$G395];[$JSON.$E$1];IF(ISNA([.$T395]);&quot;null&quot;;&quot;&quot;&quot;&quot;&amp;[.$T395]&amp;&quot;&quot;&quot;&quot;);[$JSON.$F$1];[.$V395];[$JSON.$G$1];IF(ISNA([.$X395]);&quot;null&quot;;&quot;&quot;&quot;&quot;&amp;[.$X395]&amp;&quot;&quot;&quot;&quot;);[$JSON.$H$1];[.$AA395];[$JSON.$I$1];[.$I395];[$JSON.$J$1];[.K395];[$JSON.$K$1];[.$M395];[$JSON.$L$1];[.$P395];[$JSON.$M$1];[.$O395];[$JSON.$N$1];[.$S395];[$JSON.$O$1];[.$U395];[$JSON.$P$1];IF(ISNA([.$W395]);&quot;null&quot;;[.$W395]);[$JSON.$Q$1];[.$Y395];[$JSON.$R$1];IF([.$Z395];&quot;true&quot;;&quot;false&quot;);[$JSON.$S$1];[.$A395];[$JSON.$T$1];[.$B395];[$JSON.$U$1])" office:value-type="string" office:string-value="{&quot;id&quot;:&quot;2nd1-4&quot;,&quot;name&quot;:&quot;ティムール&quot;,&quot;displayName&quot;:&quot;ティムール&quot;,&quot;kana&quot;:&quot;てぃむーる&quot;,&quot;traitText&quot;:null,&quot;ruleText&quot;:&quot;トリプルプレッシャー¶これは赤のイジンにも青のイジンにもブロックされない。&quot;,&quot;legacyText&quot;:null,&quot;imageUrl&quot;:&quot;https://one-draw.jp/ijinden/cardlist/005/card/05_004.png&quot;,&quot;expansion&quot;:55,&quot;rarity&quot;:4,&quot;type&quot;:1,&quot;level&quot;:6,&quot;color&quot;:2,&quot;term&quot;:0,&quot;trait&quot;:0,&quot;power&quot;:4000,&quot;legacy&quot;:0,&quot;anyNumCopies&quot;:false,&quot;orderTable&quot;:394,&quot;orderDeck&quot;:240}," calcext:value-type="string">
            <text:p>{"id":"2nd1-4","name":"ティムール","displayName":"ティムール","kana":"てぃむーる","traitText":null,"ruleText":"トリプルプレッシャー¶これは赤のイジンにも青のイジンにもブロックされない。","legacyText":null,"imageUrl":"https://one-draw.jp/ijinden/cardlist/005/card/05_004.png","expansion":55,"rarity":4,"type":1,"level":6,"color":2,"term":0,"trait":0,"power":4000,"legacy":0,"anyNumCopies":false,"orderTable":394,"orderDeck":240},</text:p>
          </table:table-cell>
          <table:table-cell table:number-columns-repeated="16356"/>
        </table:table-row>
        <table:table-row table:style-name="ro2">
          <table:table-cell table:style-name="ce11" office:value-type="float" office:value="395" calcext:value-type="float">
            <text:p>395</text:p>
          </table:table-cell>
          <table:table-cell table:style-name="ce11" office:value-type="float" office:value="293" calcext:value-type="float">
            <text:p>293</text:p>
          </table:table-cell>
          <table:table-cell table:formula="of:=CONCATENATE(&quot;2nd1-&quot;;TEXT([.D396];&quot;0&quot;))" office:value-type="string" office:string-value="2nd1-5" calcext:value-type="string">
            <text:p>2nd1-5</text:p>
          </table:table-cell>
          <table:table-cell office:value-type="float" office:value="5" calcext:value-type="float">
            <text:p>5</text:p>
          </table:table-cell>
          <table:table-cell office:value-type="string" calcext:value-type="string">
            <text:p>福沢諭吉</text:p>
          </table:table-cell>
          <table:table-cell table:style-name="ce11" table:formula="of:=[.E396]" office:value-type="string" office:string-value="福沢諭吉" calcext:value-type="string">
            <text:p>福沢諭吉</text:p>
          </table:table-cell>
          <table:table-cell office:value-type="string" calcext:value-type="string">
            <text:p>ふくざわゆきち</text:p>
          </table:table-cell>
          <table:table-cell table:style-name="ce11" office:value-type="string" calcext:value-type="string">
            <text:p>第５弾ブースターパック</text:p>
          </table:table-cell>
          <table:table-cell table:style-name="ce11" table:formula="of:=VLOOKUP([.H396];[$収録番号.$A$1:$収録番号.$B$10];2;0)" office:value-type="float" office:value="55" calcext:value-type="float">
            <text:p>55</text:p>
          </table:table-cell>
          <table:table-cell office:value-type="string" calcext:value-type="string">
            <text:p>SR</text:p>
          </table:table-cell>
          <table:table-cell table:style-name="ce11" table:formula="of:=VLOOKUP([.J396];[$レアリティ番号.$A$1:$レアリティ番号.$B$4];2;0)" office:value-type="float" office:value="4" calcext:value-type="float">
            <text:p>4</text:p>
          </table:table-cell>
          <table:table-cell office:value-type="string" calcext:value-type="string">
            <text:p>イジン</text:p>
          </table:table-cell>
          <table:table-cell table:style-name="ce11" table:formula="of:=VLOOKUP([.L396];[$種類番号.$A$1:$種類番号.$B$4];2;0)" office:value-type="float" office:value="1" calcext:value-type="float">
            <text:p>1</text:p>
          </table:table-cell>
          <table:table-cell office:value-type="string" calcext:value-type="string">
            <text:p>緑</text:p>
          </table:table-cell>
          <table:table-cell table:style-name="ce11" table:formula="of:=VLOOKUP([.N396];[$色番号.$A$1:$色番号.$B$10];2;0)" office:value-type="float" office:value="4" calcext:value-type="float">
            <text:p>4</text:p>
          </table:table-cell>
          <table:table-cell office:value-type="float" office:value="9" calcext:value-type="float">
            <text:p>9</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96];[$特性番号.$A$1:$特性番号.$B$8];2;0);0)" office:value-type="float" office:value="0" calcext:value-type="float">
            <text:p>0</text:p>
          </table:table-cell>
          <table:table-cell office:value-type="string" calcext:value-type="string">
            <text:p>この能力は戦場で効果を発揮する。自分と相手の戦場の緑でないイジンは、能力すべてを失う。この能力は能力によって失われない。</text:p>
          </table:table-cell>
          <table:table-cell office:value-type="float" office:value="10000" calcext:value-type="float">
            <text:p>10000</text:p>
          </table:table-cell>
          <table:table-cell table:style-name="ce25" table:formula="of:=NA()" office:value-type="string" office:string-value="" calcext:value-type="error">
            <text:p>#N/A</text:p>
          </table:table-cell>
          <table:table-cell table:style-name="ce11" table:formula="of:=IFERROR(VLOOKUP([.$X396];[$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05.png</text:p>
          </table:table-cell>
          <table:table-cell table:style-name="ce11" table:formula="of:=CONCATENATE([$JSON.$A$1];[.$C396];[$JSON.$B$1];[.$E396];[$JSON.$C$1];[.F396];[$JSON.$D$1];[.$G396];[$JSON.$E$1];IF(ISNA([.$T396]);&quot;null&quot;;&quot;&quot;&quot;&quot;&amp;[.$T396]&amp;&quot;&quot;&quot;&quot;);[$JSON.$F$1];[.$V396];[$JSON.$G$1];IF(ISNA([.$X396]);&quot;null&quot;;&quot;&quot;&quot;&quot;&amp;[.$X396]&amp;&quot;&quot;&quot;&quot;);[$JSON.$H$1];[.$AA396];[$JSON.$I$1];[.$I396];[$JSON.$J$1];[.K396];[$JSON.$K$1];[.$M396];[$JSON.$L$1];[.$P396];[$JSON.$M$1];[.$O396];[$JSON.$N$1];[.$S396];[$JSON.$O$1];[.$U396];[$JSON.$P$1];IF(ISNA([.$W396]);&quot;null&quot;;[.$W396]);[$JSON.$Q$1];[.$Y396];[$JSON.$R$1];IF([.$Z396];&quot;true&quot;;&quot;false&quot;);[$JSON.$S$1];[.$A396];[$JSON.$T$1];[.$B396];[$JSON.$U$1])" office:value-type="string" office:string-value="{&quot;id&quot;:&quot;2nd1-5&quot;,&quot;name&quot;:&quot;福沢諭吉&quot;,&quot;displayName&quot;:&quot;福沢諭吉&quot;,&quot;kana&quot;:&quot;ふくざわゆきち&quot;,&quot;traitText&quot;:null,&quot;ruleText&quot;:&quot;この能力は戦場で効果を発揮する。自分と相手の戦場の緑でないイジンは、能力すべてを失う。この能力は能力によって失われない。&quot;,&quot;legacyText&quot;:null,&quot;imageUrl&quot;:&quot;https://one-draw.jp/ijinden/cardlist/005/card/05_005.png&quot;,&quot;expansion&quot;:55,&quot;rarity&quot;:4,&quot;type&quot;:1,&quot;level&quot;:9,&quot;color&quot;:4,&quot;term&quot;:0,&quot;trait&quot;:0,&quot;power&quot;:10000,&quot;legacy&quot;:0,&quot;anyNumCopies&quot;:false,&quot;orderTable&quot;:395,&quot;orderDeck&quot;:293}," calcext:value-type="string">
            <text:p>{"id":"2nd1-5","name":"福沢諭吉","displayName":"福沢諭吉","kana":"ふくざわゆきち","traitText":null,"ruleText":"この能力は戦場で効果を発揮する。自分と相手の戦場の緑でないイジンは、能力すべてを失う。この能力は能力によって失われない。","legacyText":null,"imageUrl":"https://one-draw.jp/ijinden/cardlist/005/card/05_005.png","expansion":55,"rarity":4,"type":1,"level":9,"color":4,"term":0,"trait":0,"power":10000,"legacy":0,"anyNumCopies":false,"orderTable":395,"orderDeck":293},</text:p>
          </table:table-cell>
          <table:table-cell table:number-columns-repeated="16356"/>
        </table:table-row>
        <table:table-row table:style-name="ro2">
          <table:table-cell table:style-name="ce11" office:value-type="float" office:value="396" calcext:value-type="float">
            <text:p>396</text:p>
          </table:table-cell>
          <table:table-cell table:style-name="ce11" office:value-type="float" office:value="213" calcext:value-type="float">
            <text:p>213</text:p>
          </table:table-cell>
          <table:table-cell table:formula="of:=CONCATENATE(&quot;2nd1-&quot;;TEXT([.D397];&quot;0&quot;))" office:value-type="string" office:string-value="2nd1-6" calcext:value-type="string">
            <text:p>2nd1-6</text:p>
          </table:table-cell>
          <table:table-cell office:value-type="float" office:value="6" calcext:value-type="float">
            <text:p>6</text:p>
          </table:table-cell>
          <table:table-cell office:value-type="string" calcext:value-type="string">
            <text:p>春日局</text:p>
          </table:table-cell>
          <table:table-cell table:style-name="ce11" table:formula="of:=[.E397]" office:value-type="string" office:string-value="春日局" calcext:value-type="string">
            <text:p>春日局</text:p>
          </table:table-cell>
          <table:table-cell office:value-type="string" calcext:value-type="string">
            <text:p>かすがのつぼね</text:p>
          </table:table-cell>
          <table:table-cell table:style-name="ce11" office:value-type="string" calcext:value-type="string">
            <text:p>第５弾ブースターパック</text:p>
          </table:table-cell>
          <table:table-cell table:style-name="ce11" table:formula="of:=VLOOKUP([.H397];[$収録番号.$A$1:$収録番号.$B$10];2;0)" office:value-type="float" office:value="55" calcext:value-type="float">
            <text:p>55</text:p>
          </table:table-cell>
          <table:table-cell office:value-type="string" calcext:value-type="string">
            <text:p>SR</text:p>
          </table:table-cell>
          <table:table-cell table:style-name="ce11" table:formula="of:=VLOOKUP([.J397];[$レアリティ番号.$A$1:$レアリティ番号.$B$4];2;0)" office:value-type="float" office:value="4" calcext:value-type="float">
            <text:p>4</text:p>
          </table:table-cell>
          <table:table-cell office:value-type="string" calcext:value-type="string">
            <text:p>イジン</text:p>
          </table:table-cell>
          <table:table-cell table:style-name="ce11" table:formula="of:=VLOOKUP([.L397];[$種類番号.$A$1:$種類番号.$B$4];2;0)" office:value-type="float" office:value="1" calcext:value-type="float">
            <text:p>1</text:p>
          </table:table-cell>
          <table:table-cell office:value-type="string" calcext:value-type="string">
            <text:p>緑</text:p>
          </table:table-cell>
          <table:table-cell table:style-name="ce11" table:formula="of:=VLOOKUP([.N397];[$色番号.$A$1:$色番号.$B$10];2;0)" office:value-type="float" office:value="4" calcext:value-type="float">
            <text:p>4</text:p>
          </table:table-cell>
          <table:table-cell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97];[$特性番号.$A$1:$特性番号.$B$8];2;0);0)" office:value-type="float" office:value="0" calcext:value-type="float">
            <text:p>0</text:p>
          </table:table-cell>
          <table:table-cell office:value-type="string" calcext:value-type="string">
            <text:p>この能力は、自分のメインフェイズが開始したときに戦場で発動できる。相手の戦場のパワー4000以下のイジンすべてを裏にして魔力ゾーンに置いて、自分の戦場のイジンすべてを手札に戻す。</text:p>
          </table:table-cell>
          <table:table-cell office:value-type="float" office:value="4000" calcext:value-type="float">
            <text:p>4000</text:p>
          </table:table-cell>
          <table:table-cell office:value-type="string" calcext:value-type="string">
            <text:p>1ドローする</text:p>
          </table:table-cell>
          <table:table-cell table:style-name="ce11" table:formula="of:=IFERROR(VLOOKUP([.$X397];[$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06.png</text:p>
          </table:table-cell>
          <table:table-cell table:style-name="ce11" table:formula="of:=CONCATENATE([$JSON.$A$1];[.$C397];[$JSON.$B$1];[.$E397];[$JSON.$C$1];[.F397];[$JSON.$D$1];[.$G397];[$JSON.$E$1];IF(ISNA([.$T397]);&quot;null&quot;;&quot;&quot;&quot;&quot;&amp;[.$T397]&amp;&quot;&quot;&quot;&quot;);[$JSON.$F$1];[.$V397];[$JSON.$G$1];IF(ISNA([.$X397]);&quot;null&quot;;&quot;&quot;&quot;&quot;&amp;[.$X397]&amp;&quot;&quot;&quot;&quot;);[$JSON.$H$1];[.$AA397];[$JSON.$I$1];[.$I397];[$JSON.$J$1];[.K397];[$JSON.$K$1];[.$M397];[$JSON.$L$1];[.$P397];[$JSON.$M$1];[.$O397];[$JSON.$N$1];[.$S397];[$JSON.$O$1];[.$U397];[$JSON.$P$1];IF(ISNA([.$W397]);&quot;null&quot;;[.$W397]);[$JSON.$Q$1];[.$Y397];[$JSON.$R$1];IF([.$Z397];&quot;true&quot;;&quot;false&quot;);[$JSON.$S$1];[.$A397];[$JSON.$T$1];[.$B397];[$JSON.$U$1])" office:value-type="string" office:string-value="{&quot;id&quot;:&quot;2nd1-6&quot;,&quot;name&quot;:&quot;春日局&quot;,&quot;displayName&quot;:&quot;春日局&quot;,&quot;kana&quot;:&quot;かすがのつぼね&quot;,&quot;traitText&quot;:null,&quot;ruleText&quot;:&quot;この能力は、自分のメインフェイズが開始したときに戦場で発動できる。相手の戦場のパワー4000以下のイジンすべてを裏にして魔力ゾーンに置いて、自分の戦場のイジンすべてを手札に戻す。&quot;,&quot;legacyText&quot;:&quot;1ドローする&quot;,&quot;imageUrl&quot;:&quot;https://one-draw.jp/ijinden/cardlist/005/card/05_006.png&quot;,&quot;expansion&quot;:55,&quot;rarity&quot;:4,&quot;type&quot;:1,&quot;level&quot;:5,&quot;color&quot;:4,&quot;term&quot;:0,&quot;trait&quot;:0,&quot;power&quot;:4000,&quot;legacy&quot;:4,&quot;anyNumCopies&quot;:false,&quot;orderTable&quot;:396,&quot;orderDeck&quot;:213}," calcext:value-type="string">
            <text:p>{"id":"2nd1-6","name":"春日局","displayName":"春日局","kana":"かすがのつぼね","traitText":null,"ruleText":"この能力は、自分のメインフェイズが開始したときに戦場で発動できる。相手の戦場のパワー4000以下のイジンすべてを裏にして魔力ゾーンに置いて、自分の戦場のイジンすべてを手札に戻す。","legacyText":"1ドローする","imageUrl":"https://one-draw.jp/ijinden/cardlist/005/card/05_006.png","expansion":55,"rarity":4,"type":1,"level":5,"color":4,"term":0,"trait":0,"power":4000,"legacy":4,"anyNumCopies":false,"orderTable":396,"orderDeck":213},</text:p>
          </table:table-cell>
          <table:table-cell table:number-columns-repeated="16356"/>
        </table:table-row>
        <table:table-row table:style-name="ro2">
          <table:table-cell table:style-name="ce11" office:value-type="float" office:value="397" calcext:value-type="float">
            <text:p>397</text:p>
          </table:table-cell>
          <table:table-cell table:style-name="ce11" office:value-type="float" office:value="126" calcext:value-type="float">
            <text:p>126</text:p>
          </table:table-cell>
          <table:table-cell table:formula="of:=CONCATENATE(&quot;2nd1-&quot;;TEXT([.D398];&quot;0&quot;))" office:value-type="string" office:string-value="2nd1-7" calcext:value-type="string">
            <text:p>2nd1-7</text:p>
          </table:table-cell>
          <table:table-cell office:value-type="float" office:value="7" calcext:value-type="float">
            <text:p>7</text:p>
          </table:table-cell>
          <table:table-cell office:value-type="string" calcext:value-type="string">
            <text:p>劉邦</text:p>
          </table:table-cell>
          <table:table-cell table:style-name="ce11" table:formula="of:=[.E398]" office:value-type="string" office:string-value="劉邦" calcext:value-type="string">
            <text:p>劉邦</text:p>
          </table:table-cell>
          <table:table-cell office:value-type="string" calcext:value-type="string">
            <text:p>りゅうほう</text:p>
          </table:table-cell>
          <table:table-cell table:style-name="ce11" office:value-type="string" calcext:value-type="string">
            <text:p>第５弾ブースターパック</text:p>
          </table:table-cell>
          <table:table-cell table:style-name="ce11" table:formula="of:=VLOOKUP([.H398];[$収録番号.$A$1:$収録番号.$B$10];2;0)" office:value-type="float" office:value="55" calcext:value-type="float">
            <text:p>55</text:p>
          </table:table-cell>
          <table:table-cell office:value-type="string" calcext:value-type="string">
            <text:p>SR</text:p>
          </table:table-cell>
          <table:table-cell table:style-name="ce11" table:formula="of:=VLOOKUP([.J398];[$レアリティ番号.$A$1:$レアリティ番号.$B$4];2;0)" office:value-type="float" office:value="4" calcext:value-type="float">
            <text:p>4</text:p>
          </table:table-cell>
          <table:table-cell office:value-type="string" calcext:value-type="string">
            <text:p>イジン</text:p>
          </table:table-cell>
          <table:table-cell table:style-name="ce11" table:formula="of:=VLOOKUP([.L398];[$種類番号.$A$1:$種類番号.$B$4];2;0)" office:value-type="float" office:value="1" calcext:value-type="float">
            <text:p>1</text:p>
          </table:table-cell>
          <table:table-cell office:value-type="string" calcext:value-type="string">
            <text:p>黄</text:p>
          </table:table-cell>
          <table:table-cell table:style-name="ce11" table:formula="of:=VLOOKUP([.N398];[$色番号.$A$1:$色番号.$B$10];2;0)" office:value-type="float" office:value="8" calcext:value-type="float">
            <text:p>8</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98];[$特性番号.$A$1:$特性番号.$B$8];2;0);0)" office:value-type="float" office:value="0" calcext:value-type="float">
            <text:p>0</text:p>
          </table:table-cell>
          <table:table-cell office:value-type="string" calcext:value-type="string">
            <text:p>ドレイン¶アタック+2000</text:p>
          </table:table-cell>
          <table:table-cell office:value-type="float" office:value="2000" calcext:value-type="float">
            <text:p>2000</text:p>
          </table:table-cell>
          <table:table-cell office:value-type="string" calcext:value-type="string">
            <text:p>1ドローする</text:p>
          </table:table-cell>
          <table:table-cell table:style-name="ce11" table:formula="of:=IFERROR(VLOOKUP([.$X398];[$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07.png</text:p>
          </table:table-cell>
          <table:table-cell table:style-name="ce11" table:formula="of:=CONCATENATE([$JSON.$A$1];[.$C398];[$JSON.$B$1];[.$E398];[$JSON.$C$1];[.F398];[$JSON.$D$1];[.$G398];[$JSON.$E$1];IF(ISNA([.$T398]);&quot;null&quot;;&quot;&quot;&quot;&quot;&amp;[.$T398]&amp;&quot;&quot;&quot;&quot;);[$JSON.$F$1];[.$V398];[$JSON.$G$1];IF(ISNA([.$X398]);&quot;null&quot;;&quot;&quot;&quot;&quot;&amp;[.$X398]&amp;&quot;&quot;&quot;&quot;);[$JSON.$H$1];[.$AA398];[$JSON.$I$1];[.$I398];[$JSON.$J$1];[.K398];[$JSON.$K$1];[.$M398];[$JSON.$L$1];[.$P398];[$JSON.$M$1];[.$O398];[$JSON.$N$1];[.$S398];[$JSON.$O$1];[.$U398];[$JSON.$P$1];IF(ISNA([.$W398]);&quot;null&quot;;[.$W398]);[$JSON.$Q$1];[.$Y398];[$JSON.$R$1];IF([.$Z398];&quot;true&quot;;&quot;false&quot;);[$JSON.$S$1];[.$A398];[$JSON.$T$1];[.$B398];[$JSON.$U$1])" office:value-type="string" office:string-value="{&quot;id&quot;:&quot;2nd1-7&quot;,&quot;name&quot;:&quot;劉邦&quot;,&quot;displayName&quot;:&quot;劉邦&quot;,&quot;kana&quot;:&quot;りゅうほう&quot;,&quot;traitText&quot;:null,&quot;ruleText&quot;:&quot;ドレイン¶アタック+2000&quot;,&quot;legacyText&quot;:&quot;1ドローする&quot;,&quot;imageUrl&quot;:&quot;https://one-draw.jp/ijinden/cardlist/005/card/05_007.png&quot;,&quot;expansion&quot;:55,&quot;rarity&quot;:4,&quot;type&quot;:1,&quot;level&quot;:3,&quot;color&quot;:8,&quot;term&quot;:0,&quot;trait&quot;:0,&quot;power&quot;:2000,&quot;legacy&quot;:4,&quot;anyNumCopies&quot;:false,&quot;orderTable&quot;:397,&quot;orderDeck&quot;:126}," calcext:value-type="string">
            <text:p>{"id":"2nd1-7","name":"劉邦","displayName":"劉邦","kana":"りゅうほう","traitText":null,"ruleText":"ドレイン¶アタック+2000","legacyText":"1ドローする","imageUrl":"https://one-draw.jp/ijinden/cardlist/005/card/05_007.png","expansion":55,"rarity":4,"type":1,"level":3,"color":8,"term":0,"trait":0,"power":2000,"legacy":4,"anyNumCopies":false,"orderTable":397,"orderDeck":126},</text:p>
          </table:table-cell>
          <table:table-cell table:number-columns-repeated="16356"/>
        </table:table-row>
        <table:table-row table:style-name="ro2">
          <table:table-cell table:style-name="ce11" office:value-type="float" office:value="398" calcext:value-type="float">
            <text:p>398</text:p>
          </table:table-cell>
          <table:table-cell table:style-name="ce11" office:value-type="float" office:value="173" calcext:value-type="float">
            <text:p>173</text:p>
          </table:table-cell>
          <table:table-cell table:formula="of:=CONCATENATE(&quot;2nd1-&quot;;TEXT([.D399];&quot;0&quot;))" office:value-type="string" office:string-value="2nd1-8" calcext:value-type="string">
            <text:p>2nd1-8</text:p>
          </table:table-cell>
          <table:table-cell office:value-type="float" office:value="8" calcext:value-type="float">
            <text:p>8</text:p>
          </table:table-cell>
          <table:table-cell office:value-type="string" calcext:value-type="string">
            <text:p>ソクラテス</text:p>
          </table:table-cell>
          <table:table-cell table:style-name="ce11" table:formula="of:=[.E399]" office:value-type="string" office:string-value="ソクラテス" calcext:value-type="string">
            <text:p>ソクラテス</text:p>
          </table:table-cell>
          <table:table-cell office:value-type="string" calcext:value-type="string">
            <text:p>そくらてす</text:p>
          </table:table-cell>
          <table:table-cell table:style-name="ce11" office:value-type="string" calcext:value-type="string">
            <text:p>第５弾ブースターパック</text:p>
          </table:table-cell>
          <table:table-cell table:style-name="ce11" table:formula="of:=VLOOKUP([.H399];[$収録番号.$A$1:$収録番号.$B$10];2;0)" office:value-type="float" office:value="55" calcext:value-type="float">
            <text:p>55</text:p>
          </table:table-cell>
          <table:table-cell office:value-type="string" calcext:value-type="string">
            <text:p>SR</text:p>
          </table:table-cell>
          <table:table-cell table:style-name="ce11" table:formula="of:=VLOOKUP([.J399];[$レアリティ番号.$A$1:$レアリティ番号.$B$4];2;0)" office:value-type="float" office:value="4" calcext:value-type="float">
            <text:p>4</text:p>
          </table:table-cell>
          <table:table-cell office:value-type="string" calcext:value-type="string">
            <text:p>イジン</text:p>
          </table:table-cell>
          <table:table-cell table:style-name="ce11" table:formula="of:=VLOOKUP([.L399];[$種類番号.$A$1:$種類番号.$B$4];2;0)" office:value-type="float" office:value="1" calcext:value-type="float">
            <text:p>1</text:p>
          </table:table-cell>
          <table:table-cell office:value-type="string" calcext:value-type="string">
            <text:p>黄</text:p>
          </table:table-cell>
          <table:table-cell table:style-name="ce11" table:formula="of:=VLOOKUP([.N399];[$色番号.$A$1:$色番号.$B$10];2;0)" office:value-type="float" office:value="8" calcext:value-type="float">
            <text:p>8</text:p>
          </table:table-cell>
          <table:table-cell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39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399];[$特性番号.$A$1:$特性番号.$B$8];2;0);0)" office:value-type="float" office:value="0" calcext:value-type="float">
            <text:p>0</text:p>
          </table:table-cell>
          <table:table-cell office:value-type="string" calcext:value-type="string">
            <text:p>この能力は戦場で効果を発揮する。相手は、マホウ使用とハイケイ使用を、合わせてターンに1回しかできない。</text:p>
          </table:table-cell>
          <table:table-cell office:value-type="float" office:value="4000" calcext:value-type="float">
            <text:p>4000</text:p>
          </table:table-cell>
          <table:table-cell office:value-type="string" calcext:value-type="string">
            <text:p>1ドローする</text:p>
          </table:table-cell>
          <table:table-cell table:style-name="ce11" table:formula="of:=IFERROR(VLOOKUP([.$X399];[$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08.png</text:p>
          </table:table-cell>
          <table:table-cell table:style-name="ce11" table:formula="of:=CONCATENATE([$JSON.$A$1];[.$C399];[$JSON.$B$1];[.$E399];[$JSON.$C$1];[.F399];[$JSON.$D$1];[.$G399];[$JSON.$E$1];IF(ISNA([.$T399]);&quot;null&quot;;&quot;&quot;&quot;&quot;&amp;[.$T399]&amp;&quot;&quot;&quot;&quot;);[$JSON.$F$1];[.$V399];[$JSON.$G$1];IF(ISNA([.$X399]);&quot;null&quot;;&quot;&quot;&quot;&quot;&amp;[.$X399]&amp;&quot;&quot;&quot;&quot;);[$JSON.$H$1];[.$AA399];[$JSON.$I$1];[.$I399];[$JSON.$J$1];[.K399];[$JSON.$K$1];[.$M399];[$JSON.$L$1];[.$P399];[$JSON.$M$1];[.$O399];[$JSON.$N$1];[.$S399];[$JSON.$O$1];[.$U399];[$JSON.$P$1];IF(ISNA([.$W399]);&quot;null&quot;;[.$W399]);[$JSON.$Q$1];[.$Y399];[$JSON.$R$1];IF([.$Z399];&quot;true&quot;;&quot;false&quot;);[$JSON.$S$1];[.$A399];[$JSON.$T$1];[.$B399];[$JSON.$U$1])" office:value-type="string" office:string-value="{&quot;id&quot;:&quot;2nd1-8&quot;,&quot;name&quot;:&quot;ソクラテス&quot;,&quot;displayName&quot;:&quot;ソクラテス&quot;,&quot;kana&quot;:&quot;そくらてす&quot;,&quot;traitText&quot;:null,&quot;ruleText&quot;:&quot;この能力は戦場で効果を発揮する。相手は、マホウ使用とハイケイ使用を、合わせてターンに1回しかできない。&quot;,&quot;legacyText&quot;:&quot;1ドローする&quot;,&quot;imageUrl&quot;:&quot;https://one-draw.jp/ijinden/cardlist/005/card/05_008.png&quot;,&quot;expansion&quot;:55,&quot;rarity&quot;:4,&quot;type&quot;:1,&quot;level&quot;:4,&quot;color&quot;:8,&quot;term&quot;:0,&quot;trait&quot;:0,&quot;power&quot;:4000,&quot;legacy&quot;:4,&quot;anyNumCopies&quot;:false,&quot;orderTable&quot;:398,&quot;orderDeck&quot;:173}," calcext:value-type="string">
            <text:p>{"id":"2nd1-8","name":"ソクラテス","displayName":"ソクラテス","kana":"そくらてす","traitText":null,"ruleText":"この能力は戦場で効果を発揮する。相手は、マホウ使用とハイケイ使用を、合わせてターンに1回しかできない。","legacyText":"1ドローする","imageUrl":"https://one-draw.jp/ijinden/cardlist/005/card/05_008.png","expansion":55,"rarity":4,"type":1,"level":4,"color":8,"term":0,"trait":0,"power":4000,"legacy":4,"anyNumCopies":false,"orderTable":398,"orderDeck":173},</text:p>
          </table:table-cell>
          <table:table-cell table:number-columns-repeated="16356"/>
        </table:table-row>
        <table:table-row table:style-name="ro2">
          <table:table-cell table:style-name="ce11" office:value-type="float" office:value="399" calcext:value-type="float">
            <text:p>399</text:p>
          </table:table-cell>
          <table:table-cell table:style-name="ce11" office:value-type="float" office:value="179" calcext:value-type="float">
            <text:p>179</text:p>
          </table:table-cell>
          <table:table-cell table:formula="of:=CONCATENATE(&quot;2nd1-&quot;;TEXT([.D400];&quot;0&quot;))" office:value-type="string" office:string-value="2nd1-9" calcext:value-type="string">
            <text:p>2nd1-9</text:p>
          </table:table-cell>
          <table:table-cell office:value-type="float" office:value="9" calcext:value-type="float">
            <text:p>9</text:p>
          </table:table-cell>
          <table:table-cell office:value-type="string" calcext:value-type="string">
            <text:p>長宗我部元親</text:p>
          </table:table-cell>
          <table:table-cell table:style-name="ce11" table:formula="of:=[.E400]" office:value-type="string" office:string-value="長宗我部元親" calcext:value-type="string">
            <text:p>長宗我部元親</text:p>
          </table:table-cell>
          <table:table-cell office:value-type="string" calcext:value-type="string">
            <text:p>ちょうそかべもとちか</text:p>
          </table:table-cell>
          <table:table-cell table:style-name="ce11" office:value-type="string" calcext:value-type="string">
            <text:p>第５弾ブースターパック</text:p>
          </table:table-cell>
          <table:table-cell table:style-name="ce11" table:formula="of:=VLOOKUP([.H400];[$収録番号.$A$1:$収録番号.$B$10];2;0)" office:value-type="float" office:value="55" calcext:value-type="float">
            <text:p>55</text:p>
          </table:table-cell>
          <table:table-cell office:value-type="string" calcext:value-type="string">
            <text:p>SR</text:p>
          </table:table-cell>
          <table:table-cell table:style-name="ce11" table:formula="of:=VLOOKUP([.J400];[$レアリティ番号.$A$1:$レアリティ番号.$B$4];2;0)" office:value-type="float" office:value="4" calcext:value-type="float">
            <text:p>4</text:p>
          </table:table-cell>
          <table:table-cell office:value-type="string" calcext:value-type="string">
            <text:p>イジン</text:p>
          </table:table-cell>
          <table:table-cell table:style-name="ce11" table:formula="of:=VLOOKUP([.L400];[$種類番号.$A$1:$種類番号.$B$4];2;0)" office:value-type="float" office:value="1" calcext:value-type="float">
            <text:p>1</text:p>
          </table:table-cell>
          <table:table-cell office:value-type="string" calcext:value-type="string">
            <text:p>紫</text:p>
          </table:table-cell>
          <table:table-cell table:style-name="ce11" table:formula="of:=VLOOKUP([.N400];[$色番号.$A$1:$色番号.$B$10];2;0)" office:value-type="float" office:value="16" calcext:value-type="float">
            <text:p>16</text:p>
          </table:table-cell>
          <table:table-cell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0];[$能力語番号.$A$1:$能力語番号.$B$11];2;0);0)" office:value-type="float" office:value="0" calcext:value-type="float">
            <text:p>0</text:p>
          </table:table-cell>
          <table:table-cell office:value-type="string" calcext:value-type="string">
            <text:p>剣術</text:p>
          </table:table-cell>
          <table:table-cell table:style-name="ce11" table:formula="of:=IFERROR(VLOOKUP([.$T400];[$特性番号.$A$1:$特性番号.$B$8];2;0);0)" office:value-type="float" office:value="1" calcext:value-type="float">
            <text:p>1</text:p>
          </table:table-cell>
          <table:table-cell office:value-type="string" calcext:value-type="string">
            <text:p>この能力は、自分のエンドフェイズが開始したときに戦場で発動する。自分の戦場のガーディアン1体を破壊して、3ドローする。¶この能力は、相手の手札のカードが4つ以上なら、戦場で効果を発揮する。これは「ダブルプレッシャー」を得る。</text:p>
          </table:table-cell>
          <table:table-cell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400];[$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09.png</text:p>
          </table:table-cell>
          <table:table-cell table:style-name="ce11" table:formula="of:=CONCATENATE([$JSON.$A$1];[.$C400];[$JSON.$B$1];[.$E400];[$JSON.$C$1];[.F400];[$JSON.$D$1];[.$G400];[$JSON.$E$1];IF(ISNA([.$T400]);&quot;null&quot;;&quot;&quot;&quot;&quot;&amp;[.$T400]&amp;&quot;&quot;&quot;&quot;);[$JSON.$F$1];[.$V400];[$JSON.$G$1];IF(ISNA([.$X400]);&quot;null&quot;;&quot;&quot;&quot;&quot;&amp;[.$X400]&amp;&quot;&quot;&quot;&quot;);[$JSON.$H$1];[.$AA400];[$JSON.$I$1];[.$I400];[$JSON.$J$1];[.K400];[$JSON.$K$1];[.$M400];[$JSON.$L$1];[.$P400];[$JSON.$M$1];[.$O400];[$JSON.$N$1];[.$S400];[$JSON.$O$1];[.$U400];[$JSON.$P$1];IF(ISNA([.$W400]);&quot;null&quot;;[.$W400]);[$JSON.$Q$1];[.$Y400];[$JSON.$R$1];IF([.$Z400];&quot;true&quot;;&quot;false&quot;);[$JSON.$S$1];[.$A400];[$JSON.$T$1];[.$B400];[$JSON.$U$1])" office:value-type="string" office:string-value="{&quot;id&quot;:&quot;2nd1-9&quot;,&quot;name&quot;:&quot;長宗我部元親&quot;,&quot;displayName&quot;:&quot;長宗我部元親&quot;,&quot;kana&quot;:&quot;ちょうそかべもとちか&quot;,&quot;traitText&quot;:&quot;剣術&quot;,&quot;ruleText&quot;:&quot;この能力は、自分のエンドフェイズが開始したときに戦場で発動する。自分の戦場のガーディアン1体を破壊して、3ドローする。¶この能力は、相手の手札のカードが4つ以上なら、戦場で効果を発揮する。これは「ダブルプレッシャー」を得る。&quot;,&quot;legacyText&quot;:null,&quot;imageUrl&quot;:&quot;https://one-draw.jp/ijinden/cardlist/005/card/05_009.png&quot;,&quot;expansion&quot;:55,&quot;rarity&quot;:4,&quot;type&quot;:1,&quot;level&quot;:4,&quot;color&quot;:16,&quot;term&quot;:0,&quot;trait&quot;:1,&quot;power&quot;:5000,&quot;legacy&quot;:0,&quot;anyNumCopies&quot;:false,&quot;orderTable&quot;:399,&quot;orderDeck&quot;:179}," calcext:value-type="string">
            <text:p>{"id":"2nd1-9","name":"長宗我部元親","displayName":"長宗我部元親","kana":"ちょうそかべもとちか","traitText":"剣術","ruleText":"この能力は、自分のエンドフェイズが開始したときに戦場で発動する。自分の戦場のガーディアン1体を破壊して、3ドローする。¶この能力は、相手の手札のカードが4つ以上なら、戦場で効果を発揮する。これは「ダブルプレッシャー」を得る。","legacyText":null,"imageUrl":"https://one-draw.jp/ijinden/cardlist/005/card/05_009.png","expansion":55,"rarity":4,"type":1,"level":4,"color":16,"term":0,"trait":1,"power":5000,"legacy":0,"anyNumCopies":false,"orderTable":399,"orderDeck":179},</text:p>
          </table:table-cell>
          <table:table-cell table:number-columns-repeated="16356"/>
        </table:table-row>
        <table:table-row table:style-name="ro2">
          <table:table-cell table:style-name="ce11" office:value-type="float" office:value="400" calcext:value-type="float">
            <text:p>400</text:p>
          </table:table-cell>
          <table:table-cell table:style-name="ce11" office:value-type="float" office:value="224" calcext:value-type="float">
            <text:p>224</text:p>
          </table:table-cell>
          <table:table-cell table:formula="of:=CONCATENATE(&quot;2nd1-&quot;;TEXT([.D401];&quot;0&quot;))" office:value-type="string" office:string-value="2nd1-10" calcext:value-type="string">
            <text:p>2nd1-10</text:p>
          </table:table-cell>
          <table:table-cell office:value-type="float" office:value="10" calcext:value-type="float">
            <text:p>10</text:p>
          </table:table-cell>
          <table:table-cell office:value-type="string" calcext:value-type="string">
            <text:p>渋沢栄一</text:p>
          </table:table-cell>
          <table:table-cell table:style-name="ce11" table:formula="of:=[.E401]" office:value-type="string" office:string-value="渋沢栄一" calcext:value-type="string">
            <text:p>渋沢栄一</text:p>
          </table:table-cell>
          <table:table-cell office:value-type="string" calcext:value-type="string">
            <text:p>しぶさわえいいち</text:p>
          </table:table-cell>
          <table:table-cell table:style-name="ce11" office:value-type="string" calcext:value-type="string">
            <text:p>第５弾ブースターパック</text:p>
          </table:table-cell>
          <table:table-cell table:style-name="ce11" table:formula="of:=VLOOKUP([.H401];[$収録番号.$A$1:$収録番号.$B$10];2;0)" office:value-type="float" office:value="55" calcext:value-type="float">
            <text:p>55</text:p>
          </table:table-cell>
          <table:table-cell office:value-type="string" calcext:value-type="string">
            <text:p>SR</text:p>
          </table:table-cell>
          <table:table-cell table:style-name="ce11" table:formula="of:=VLOOKUP([.J401];[$レアリティ番号.$A$1:$レアリティ番号.$B$4];2;0)" office:value-type="float" office:value="4" calcext:value-type="float">
            <text:p>4</text:p>
          </table:table-cell>
          <table:table-cell office:value-type="string" calcext:value-type="string">
            <text:p>イジン</text:p>
          </table:table-cell>
          <table:table-cell table:style-name="ce11" table:formula="of:=VLOOKUP([.L401];[$種類番号.$A$1:$種類番号.$B$4];2;0)" office:value-type="float" office:value="1" calcext:value-type="float">
            <text:p>1</text:p>
          </table:table-cell>
          <table:table-cell office:value-type="string" calcext:value-type="string">
            <text:p>紫</text:p>
          </table:table-cell>
          <table:table-cell table:style-name="ce11" table:formula="of:=VLOOKUP([.N401];[$色番号.$A$1:$色番号.$B$10];2;0)" office:value-type="float" office:value="16" calcext:value-type="float">
            <text:p>16</text:p>
          </table:table-cell>
          <table:table-cell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01];[$特性番号.$A$1:$特性番号.$B$8];2;0);0)" office:value-type="float" office:value="0" calcext:value-type="float">
            <text:p>0</text:p>
          </table:table-cell>
          <table:table-cell office:value-type="string" calcext:value-type="string">
            <text:p>この能力は、ターンに1回だけ、戦場で発動する。自分か相手の墓地にハイケイが置かれたとき、自分と相手の戦場のガーディアンを合わせて3体まで指定して発動できる。そのガーディアンすべてを手札に戻す。</text:p>
          </table:table-cell>
          <table:table-cell office:value-type="float" office:value="4500" calcext:value-type="float">
            <text:p>4500</text:p>
          </table:table-cell>
          <table:table-cell office:value-type="string" calcext:value-type="string">
            <text:p>1ドローする</text:p>
          </table:table-cell>
          <table:table-cell table:style-name="ce11" table:formula="of:=IFERROR(VLOOKUP([.$X401];[$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10.png</text:p>
          </table:table-cell>
          <table:table-cell table:style-name="ce11" table:formula="of:=CONCATENATE([$JSON.$A$1];[.$C401];[$JSON.$B$1];[.$E401];[$JSON.$C$1];[.F401];[$JSON.$D$1];[.$G401];[$JSON.$E$1];IF(ISNA([.$T401]);&quot;null&quot;;&quot;&quot;&quot;&quot;&amp;[.$T401]&amp;&quot;&quot;&quot;&quot;);[$JSON.$F$1];[.$V401];[$JSON.$G$1];IF(ISNA([.$X401]);&quot;null&quot;;&quot;&quot;&quot;&quot;&amp;[.$X401]&amp;&quot;&quot;&quot;&quot;);[$JSON.$H$1];[.$AA401];[$JSON.$I$1];[.$I401];[$JSON.$J$1];[.K401];[$JSON.$K$1];[.$M401];[$JSON.$L$1];[.$P401];[$JSON.$M$1];[.$O401];[$JSON.$N$1];[.$S401];[$JSON.$O$1];[.$U401];[$JSON.$P$1];IF(ISNA([.$W401]);&quot;null&quot;;[.$W401]);[$JSON.$Q$1];[.$Y401];[$JSON.$R$1];IF([.$Z401];&quot;true&quot;;&quot;false&quot;);[$JSON.$S$1];[.$A401];[$JSON.$T$1];[.$B401];[$JSON.$U$1])" office:value-type="string" office:string-value="{&quot;id&quot;:&quot;2nd1-10&quot;,&quot;name&quot;:&quot;渋沢栄一&quot;,&quot;displayName&quot;:&quot;渋沢栄一&quot;,&quot;kana&quot;:&quot;しぶさわえいいち&quot;,&quot;traitText&quot;:null,&quot;ruleText&quot;:&quot;この能力は、ターンに1回だけ、戦場で発動する。自分か相手の墓地にハイケイが置かれたとき、自分と相手の戦場のガーディアンを合わせて3体まで指定して発動できる。そのガーディアンすべてを手札に戻す。&quot;,&quot;legacyText&quot;:&quot;1ドローする&quot;,&quot;imageUrl&quot;:&quot;https://one-draw.jp/ijinden/cardlist/005/card/05_010.png&quot;,&quot;expansion&quot;:55,&quot;rarity&quot;:4,&quot;type&quot;:1,&quot;level&quot;:5,&quot;color&quot;:16,&quot;term&quot;:0,&quot;trait&quot;:0,&quot;power&quot;:4500,&quot;legacy&quot;:4,&quot;anyNumCopies&quot;:false,&quot;orderTable&quot;:400,&quot;orderDeck&quot;:224}," calcext:value-type="string">
            <text:p>{"id":"2nd1-10","name":"渋沢栄一","displayName":"渋沢栄一","kana":"しぶさわえいいち","traitText":null,"ruleText":"この能力は、ターンに1回だけ、戦場で発動する。自分か相手の墓地にハイケイが置かれたとき、自分と相手の戦場のガーディアンを合わせて3体まで指定して発動できる。そのガーディアンすべてを手札に戻す。","legacyText":"1ドローする","imageUrl":"https://one-draw.jp/ijinden/cardlist/005/card/05_010.png","expansion":55,"rarity":4,"type":1,"level":5,"color":16,"term":0,"trait":0,"power":4500,"legacy":4,"anyNumCopies":false,"orderTable":400,"orderDeck":224},</text:p>
          </table:table-cell>
          <table:table-cell table:number-columns-repeated="16356"/>
        </table:table-row>
        <table:table-row table:style-name="ro2">
          <table:table-cell table:style-name="ce11" office:value-type="float" office:value="401" calcext:value-type="float">
            <text:p>401</text:p>
          </table:table-cell>
          <table:table-cell table:style-name="ce11" office:value-type="float" office:value="143" calcext:value-type="float">
            <text:p>143</text:p>
          </table:table-cell>
          <table:table-cell table:formula="of:=CONCATENATE(&quot;2nd1-&quot;;TEXT([.D402];&quot;0&quot;))" office:value-type="string" office:string-value="2nd1-11" calcext:value-type="string">
            <text:p>2nd1-11</text:p>
          </table:table-cell>
          <table:table-cell office:value-type="float" office:value="11" calcext:value-type="float">
            <text:p>11</text:p>
          </table:table-cell>
          <table:table-cell office:value-type="string" calcext:value-type="string">
            <text:p>坂上田村麻呂</text:p>
          </table:table-cell>
          <table:table-cell office:value-type="string" calcext:value-type="string">
            <text:p>坂上田村麻呂 (第5弾)</text:p>
          </table:table-cell>
          <table:table-cell office:value-type="string" calcext:value-type="string">
            <text:p>さかのうえのたむらまろ</text:p>
          </table:table-cell>
          <table:table-cell table:style-name="ce11" office:value-type="string" calcext:value-type="string">
            <text:p>第５弾ブースターパック</text:p>
          </table:table-cell>
          <table:table-cell table:style-name="ce11" table:formula="of:=VLOOKUP([.H402];[$収録番号.$A$1:$収録番号.$B$10];2;0)" office:value-type="float" office:value="55" calcext:value-type="float">
            <text:p>55</text:p>
          </table:table-cell>
          <table:table-cell office:value-type="string" calcext:value-type="string">
            <text:p>N</text:p>
          </table:table-cell>
          <table:table-cell table:style-name="ce11" table:formula="of:=VLOOKUP([.J402];[$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02];[$種類番号.$A$1:$種類番号.$B$4];2;0)" office:value-type="float" office:value="1" calcext:value-type="float">
            <text:p>1</text:p>
          </table:table-cell>
          <table:table-cell office:value-type="string" calcext:value-type="string">
            <text:p>赤</text:p>
          </table:table-cell>
          <table:table-cell table:style-name="ce11" table:formula="of:=VLOOKUP([.N402];[$色番号.$A$1:$色番号.$B$10];2;0)" office:value-type="float" office:value="1" calcext:value-type="float">
            <text:p>1</text:p>
          </table:table-cell>
          <table:table-cell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2];[$能力語番号.$A$1:$能力語番号.$B$11];2;0);0)" office:value-type="float" office:value="0" calcext:value-type="float">
            <text:p>0</text:p>
          </table:table-cell>
          <table:table-cell office:value-type="string" calcext:value-type="string">
            <text:p>剣術</text:p>
          </table:table-cell>
          <table:table-cell table:style-name="ce11" table:formula="of:=IFERROR(VLOOKUP([.$T402];[$特性番号.$A$1:$特性番号.$B$8];2;0);0)" office:value-type="float" office:value="1" calcext:value-type="float">
            <text:p>1</text:p>
          </table:table-cell>
          <table:table-cell office:value-type="string" calcext:value-type="string">
            <text:p>ダブルプレッシャー</text:p>
          </table:table-cell>
          <table:table-cell office:value-type="float" office:value="1000" calcext:value-type="float">
            <text:p>1000</text:p>
          </table:table-cell>
          <table:table-cell table:style-name="ce25" table:formula="of:=NA()" office:value-type="string" office:string-value="" calcext:value-type="error">
            <text:p>#N/A</text:p>
          </table:table-cell>
          <table:table-cell table:style-name="ce11" table:formula="of:=IFERROR(VLOOKUP([.$X402];[$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11.png</text:p>
          </table:table-cell>
          <table:table-cell table:style-name="ce11" table:formula="of:=CONCATENATE([$JSON.$A$1];[.$C402];[$JSON.$B$1];[.$E402];[$JSON.$C$1];[.F402];[$JSON.$D$1];[.$G402];[$JSON.$E$1];IF(ISNA([.$T402]);&quot;null&quot;;&quot;&quot;&quot;&quot;&amp;[.$T402]&amp;&quot;&quot;&quot;&quot;);[$JSON.$F$1];[.$V402];[$JSON.$G$1];IF(ISNA([.$X402]);&quot;null&quot;;&quot;&quot;&quot;&quot;&amp;[.$X402]&amp;&quot;&quot;&quot;&quot;);[$JSON.$H$1];[.$AA402];[$JSON.$I$1];[.$I402];[$JSON.$J$1];[.K402];[$JSON.$K$1];[.$M402];[$JSON.$L$1];[.$P402];[$JSON.$M$1];[.$O402];[$JSON.$N$1];[.$S402];[$JSON.$O$1];[.$U402];[$JSON.$P$1];IF(ISNA([.$W402]);&quot;null&quot;;[.$W402]);[$JSON.$Q$1];[.$Y402];[$JSON.$R$1];IF([.$Z402];&quot;true&quot;;&quot;false&quot;);[$JSON.$S$1];[.$A402];[$JSON.$T$1];[.$B402];[$JSON.$U$1])" office:value-type="string" office:string-value="{&quot;id&quot;:&quot;2nd1-11&quot;,&quot;name&quot;:&quot;坂上田村麻呂&quot;,&quot;displayName&quot;:&quot;坂上田村麻呂 (第5弾)&quot;,&quot;kana&quot;:&quot;さかのうえのたむらまろ&quot;,&quot;traitText&quot;:&quot;剣術&quot;,&quot;ruleText&quot;:&quot;ダブルプレッシャー&quot;,&quot;legacyText&quot;:null,&quot;imageUrl&quot;:&quot;https://one-draw.jp/ijinden/cardlist/005/card/05_011.png&quot;,&quot;expansion&quot;:55,&quot;rarity&quot;:1,&quot;type&quot;:1,&quot;level&quot;:4,&quot;color&quot;:1,&quot;term&quot;:0,&quot;trait&quot;:1,&quot;power&quot;:1000,&quot;legacy&quot;:0,&quot;anyNumCopies&quot;:false,&quot;orderTable&quot;:401,&quot;orderDeck&quot;:143}," calcext:value-type="string">
            <text:p>{"id":"2nd1-11","name":"坂上田村麻呂","displayName":"坂上田村麻呂 (第5弾)","kana":"さかのうえのたむらまろ","traitText":"剣術","ruleText":"ダブルプレッシャー","legacyText":null,"imageUrl":"https://one-draw.jp/ijinden/cardlist/005/card/05_011.png","expansion":55,"rarity":1,"type":1,"level":4,"color":1,"term":0,"trait":1,"power":1000,"legacy":0,"anyNumCopies":false,"orderTable":401,"orderDeck":143},</text:p>
          </table:table-cell>
          <table:table-cell table:number-columns-repeated="16356"/>
        </table:table-row>
        <table:table-row table:style-name="ro2">
          <table:table-cell table:style-name="ce11" office:value-type="float" office:value="402" calcext:value-type="float">
            <text:p>402</text:p>
          </table:table-cell>
          <table:table-cell table:style-name="ce11" office:value-type="float" office:value="39" calcext:value-type="float">
            <text:p>39</text:p>
          </table:table-cell>
          <table:table-cell table:formula="of:=CONCATENATE(&quot;2nd1-&quot;;TEXT([.D403];&quot;0&quot;))" office:value-type="string" office:string-value="2nd1-12" calcext:value-type="string">
            <text:p>2nd1-12</text:p>
          </table:table-cell>
          <table:table-cell office:value-type="float" office:value="12" calcext:value-type="float">
            <text:p>12</text:p>
          </table:table-cell>
          <table:table-cell office:value-type="string" calcext:value-type="string">
            <text:p>ウィリアム・グラッドストン</text:p>
          </table:table-cell>
          <table:table-cell table:style-name="ce11" table:formula="of:=[.E403]" office:value-type="string" office:string-value="ウィリアム・グラッドストン" calcext:value-type="string">
            <text:p>ウィリアム・グラッドストン</text:p>
          </table:table-cell>
          <table:table-cell office:value-type="string" calcext:value-type="string">
            <text:p>うぃりあむぐらっどすとん</text:p>
          </table:table-cell>
          <table:table-cell table:style-name="ce11" office:value-type="string" calcext:value-type="string">
            <text:p>第５弾ブースターパック</text:p>
          </table:table-cell>
          <table:table-cell table:style-name="ce11" table:formula="of:=VLOOKUP([.H403];[$収録番号.$A$1:$収録番号.$B$10];2;0)" office:value-type="float" office:value="55" calcext:value-type="float">
            <text:p>55</text:p>
          </table:table-cell>
          <table:table-cell office:value-type="string" calcext:value-type="string">
            <text:p>N</text:p>
          </table:table-cell>
          <table:table-cell table:style-name="ce11" table:formula="of:=VLOOKUP([.J403];[$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03];[$種類番号.$A$1:$種類番号.$B$4];2;0)" office:value-type="float" office:value="1" calcext:value-type="float">
            <text:p>1</text:p>
          </table:table-cell>
          <table:table-cell office:value-type="string" calcext:value-type="string">
            <text:p>赤</text:p>
          </table:table-cell>
          <table:table-cell table:style-name="ce11" table:formula="of:=VLOOKUP([.N403];[$色番号.$A$1:$色番号.$B$10];2;0)" office:value-type="float" office:value="1" calcext:value-type="float">
            <text:p>1</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03];[$特性番号.$A$1:$特性番号.$B$8];2;0);0)" office:value-type="float" office:value="0" calcext:value-type="float">
            <text:p>0</text:p>
          </table:table-cell>
          <table:table-cell office:value-type="string" calcext:value-type="string">
            <text:p>この能力は、これが戦場に置かれたときに発動する。相手の戦場のパワー1000以下のイジン1体を破壊する。</text:p>
          </table:table-cell>
          <table:table-cell office:value-type="float" office:value="500" calcext:value-type="float">
            <text:p>500</text:p>
          </table:table-cell>
          <table:table-cell office:value-type="string" calcext:value-type="string">
            <text:p>1ドローする</text:p>
          </table:table-cell>
          <table:table-cell table:style-name="ce11" table:formula="of:=IFERROR(VLOOKUP([.$X403];[$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12.png</text:p>
          </table:table-cell>
          <table:table-cell table:style-name="ce11" table:formula="of:=CONCATENATE([$JSON.$A$1];[.$C403];[$JSON.$B$1];[.$E403];[$JSON.$C$1];[.F403];[$JSON.$D$1];[.$G403];[$JSON.$E$1];IF(ISNA([.$T403]);&quot;null&quot;;&quot;&quot;&quot;&quot;&amp;[.$T403]&amp;&quot;&quot;&quot;&quot;);[$JSON.$F$1];[.$V403];[$JSON.$G$1];IF(ISNA([.$X403]);&quot;null&quot;;&quot;&quot;&quot;&quot;&amp;[.$X403]&amp;&quot;&quot;&quot;&quot;);[$JSON.$H$1];[.$AA403];[$JSON.$I$1];[.$I403];[$JSON.$J$1];[.K403];[$JSON.$K$1];[.$M403];[$JSON.$L$1];[.$P403];[$JSON.$M$1];[.$O403];[$JSON.$N$1];[.$S403];[$JSON.$O$1];[.$U403];[$JSON.$P$1];IF(ISNA([.$W403]);&quot;null&quot;;[.$W403]);[$JSON.$Q$1];[.$Y403];[$JSON.$R$1];IF([.$Z403];&quot;true&quot;;&quot;false&quot;);[$JSON.$S$1];[.$A403];[$JSON.$T$1];[.$B403];[$JSON.$U$1])" office:value-type="string" office:string-value="{&quot;id&quot;:&quot;2nd1-12&quot;,&quot;name&quot;:&quot;ウィリアム・グラッドストン&quot;,&quot;displayName&quot;:&quot;ウィリアム・グラッドストン&quot;,&quot;kana&quot;:&quot;うぃりあむぐらっどすとん&quot;,&quot;traitText&quot;:null,&quot;ruleText&quot;:&quot;この能力は、これが戦場に置かれたときに発動する。相手の戦場のパワー1000以下のイジン1体を破壊する。&quot;,&quot;legacyText&quot;:&quot;1ドローする&quot;,&quot;imageUrl&quot;:&quot;https://one-draw.jp/ijinden/cardlist/005/card/05_012.png&quot;,&quot;expansion&quot;:55,&quot;rarity&quot;:1,&quot;type&quot;:1,&quot;level&quot;:2,&quot;color&quot;:1,&quot;term&quot;:0,&quot;trait&quot;:0,&quot;power&quot;:500,&quot;legacy&quot;:4,&quot;anyNumCopies&quot;:false,&quot;orderTable&quot;:402,&quot;orderDeck&quot;:39}," calcext:value-type="string">
            <text:p>{"id":"2nd1-12","name":"ウィリアム・グラッドストン","displayName":"ウィリアム・グラッドストン","kana":"うぃりあむぐらっどすとん","traitText":null,"ruleText":"この能力は、これが戦場に置かれたときに発動する。相手の戦場のパワー1000以下のイジン1体を破壊する。","legacyText":"1ドローする","imageUrl":"https://one-draw.jp/ijinden/cardlist/005/card/05_012.png","expansion":55,"rarity":1,"type":1,"level":2,"color":1,"term":0,"trait":0,"power":500,"legacy":4,"anyNumCopies":false,"orderTable":402,"orderDeck":39},</text:p>
          </table:table-cell>
          <table:table-cell table:number-columns-repeated="16356"/>
        </table:table-row>
        <table:table-row table:style-name="ro2">
          <table:table-cell table:style-name="ce11" office:value-type="float" office:value="403" calcext:value-type="float">
            <text:p>403</text:p>
          </table:table-cell>
          <table:table-cell table:style-name="ce11" office:value-type="float" office:value="6" calcext:value-type="float">
            <text:p>6</text:p>
          </table:table-cell>
          <table:table-cell table:formula="of:=CONCATENATE(&quot;2nd1-&quot;;TEXT([.D404];&quot;0&quot;))" office:value-type="string" office:string-value="2nd1-13" calcext:value-type="string">
            <text:p>2nd1-13</text:p>
          </table:table-cell>
          <table:table-cell office:value-type="float" office:value="13" calcext:value-type="float">
            <text:p>13</text:p>
          </table:table-cell>
          <table:table-cell office:value-type="string" calcext:value-type="string">
            <text:p>柴田勝家</text:p>
          </table:table-cell>
          <table:table-cell table:style-name="ce11" table:formula="of:=[.E404]" office:value-type="string" office:string-value="柴田勝家" calcext:value-type="string">
            <text:p>柴田勝家</text:p>
          </table:table-cell>
          <table:table-cell office:value-type="string" calcext:value-type="string">
            <text:p>しばたかついえ</text:p>
          </table:table-cell>
          <table:table-cell table:style-name="ce11" office:value-type="string" calcext:value-type="string">
            <text:p>第５弾ブースターパック</text:p>
          </table:table-cell>
          <table:table-cell table:style-name="ce11" table:formula="of:=VLOOKUP([.H404];[$収録番号.$A$1:$収録番号.$B$10];2;0)" office:value-type="float" office:value="55" calcext:value-type="float">
            <text:p>55</text:p>
          </table:table-cell>
          <table:table-cell office:value-type="string" calcext:value-type="string">
            <text:p>N</text:p>
          </table:table-cell>
          <table:table-cell table:style-name="ce11" table:formula="of:=VLOOKUP([.J404];[$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04];[$種類番号.$A$1:$種類番号.$B$4];2;0)" office:value-type="float" office:value="1" calcext:value-type="float">
            <text:p>1</text:p>
          </table:table-cell>
          <table:table-cell office:value-type="string" calcext:value-type="string">
            <text:p>赤</text:p>
          </table:table-cell>
          <table:table-cell table:style-name="ce11" table:formula="of:=VLOOKUP([.N404];[$色番号.$A$1:$色番号.$B$10];2;0)" office:value-type="float" office:value="1" calcext:value-type="float">
            <text:p>1</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4];[$能力語番号.$A$1:$能力語番号.$B$11];2;0);0)" office:value-type="float" office:value="0" calcext:value-type="float">
            <text:p>0</text:p>
          </table:table-cell>
          <table:table-cell office:value-type="string" calcext:value-type="string">
            <text:p>剣術</text:p>
          </table:table-cell>
          <table:table-cell table:style-name="ce11" table:formula="of:=IFERROR(VLOOKUP([.$T404];[$特性番号.$A$1:$特性番号.$B$8];2;0);0)" office:value-type="float" office:value="1" calcext:value-type="float">
            <text:p>1</text:p>
          </table:table-cell>
          <table:table-cell office:value-type="string" calcext:value-type="string">
            <text:p>即応¶これはブロッカーになれない。</text:p>
          </table:table-cell>
          <table:table-cell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404];[$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13.png</text:p>
          </table:table-cell>
          <table:table-cell table:style-name="ce11" table:formula="of:=CONCATENATE([$JSON.$A$1];[.$C404];[$JSON.$B$1];[.$E404];[$JSON.$C$1];[.F404];[$JSON.$D$1];[.$G404];[$JSON.$E$1];IF(ISNA([.$T404]);&quot;null&quot;;&quot;&quot;&quot;&quot;&amp;[.$T404]&amp;&quot;&quot;&quot;&quot;);[$JSON.$F$1];[.$V404];[$JSON.$G$1];IF(ISNA([.$X404]);&quot;null&quot;;&quot;&quot;&quot;&quot;&amp;[.$X404]&amp;&quot;&quot;&quot;&quot;);[$JSON.$H$1];[.$AA404];[$JSON.$I$1];[.$I404];[$JSON.$J$1];[.K404];[$JSON.$K$1];[.$M404];[$JSON.$L$1];[.$P404];[$JSON.$M$1];[.$O404];[$JSON.$N$1];[.$S404];[$JSON.$O$1];[.$U404];[$JSON.$P$1];IF(ISNA([.$W404]);&quot;null&quot;;[.$W404]);[$JSON.$Q$1];[.$Y404];[$JSON.$R$1];IF([.$Z404];&quot;true&quot;;&quot;false&quot;);[$JSON.$S$1];[.$A404];[$JSON.$T$1];[.$B404];[$JSON.$U$1])" office:value-type="string" office:string-value="{&quot;id&quot;:&quot;2nd1-13&quot;,&quot;name&quot;:&quot;柴田勝家&quot;,&quot;displayName&quot;:&quot;柴田勝家&quot;,&quot;kana&quot;:&quot;しばたかついえ&quot;,&quot;traitText&quot;:&quot;剣術&quot;,&quot;ruleText&quot;:&quot;即応¶これはブロッカーになれない。&quot;,&quot;legacyText&quot;:null,&quot;imageUrl&quot;:&quot;https://one-draw.jp/ijinden/cardlist/005/card/05_013.png&quot;,&quot;expansion&quot;:55,&quot;rarity&quot;:1,&quot;type&quot;:1,&quot;level&quot;:1,&quot;color&quot;:1,&quot;term&quot;:0,&quot;trait&quot;:1,&quot;power&quot;:2000,&quot;legacy&quot;:0,&quot;anyNumCopies&quot;:false,&quot;orderTable&quot;:403,&quot;orderDeck&quot;:6}," calcext:value-type="string">
            <text:p>{"id":"2nd1-13","name":"柴田勝家","displayName":"柴田勝家","kana":"しばたかついえ","traitText":"剣術","ruleText":"即応¶これはブロッカーになれない。","legacyText":null,"imageUrl":"https://one-draw.jp/ijinden/cardlist/005/card/05_013.png","expansion":55,"rarity":1,"type":1,"level":1,"color":1,"term":0,"trait":1,"power":2000,"legacy":0,"anyNumCopies":false,"orderTable":403,"orderDeck":6},</text:p>
          </table:table-cell>
          <table:table-cell table:number-columns-repeated="16356"/>
        </table:table-row>
        <table:table-row table:style-name="ro2">
          <table:table-cell table:style-name="ce11" office:value-type="float" office:value="404" calcext:value-type="float">
            <text:p>404</text:p>
          </table:table-cell>
          <table:table-cell table:style-name="ce11" office:value-type="float" office:value="193" calcext:value-type="float">
            <text:p>193</text:p>
          </table:table-cell>
          <table:table-cell table:formula="of:=CONCATENATE(&quot;2nd1-&quot;;TEXT([.D405];&quot;0&quot;))" office:value-type="string" office:string-value="2nd1-14" calcext:value-type="string">
            <text:p>2nd1-14</text:p>
          </table:table-cell>
          <table:table-cell office:value-type="float" office:value="14" calcext:value-type="float">
            <text:p>14</text:p>
          </table:table-cell>
          <table:table-cell office:value-type="string" calcext:value-type="string">
            <text:p>フィリッポス2世</text:p>
          </table:table-cell>
          <table:table-cell table:style-name="ce11" table:formula="of:=[.E405]" office:value-type="string" office:string-value="フィリッポス2世" calcext:value-type="string">
            <text:p>フィリッポス2世</text:p>
          </table:table-cell>
          <table:table-cell office:value-type="string" calcext:value-type="string">
            <text:p>ふぃりっぽすにせい</text:p>
          </table:table-cell>
          <table:table-cell table:style-name="ce11" office:value-type="string" calcext:value-type="string">
            <text:p>第５弾ブースターパック</text:p>
          </table:table-cell>
          <table:table-cell table:style-name="ce11" table:formula="of:=VLOOKUP([.H405];[$収録番号.$A$1:$収録番号.$B$10];2;0)" office:value-type="float" office:value="55" calcext:value-type="float">
            <text:p>55</text:p>
          </table:table-cell>
          <table:table-cell office:value-type="string" calcext:value-type="string">
            <text:p>N</text:p>
          </table:table-cell>
          <table:table-cell table:style-name="ce11" table:formula="of:=VLOOKUP([.J405];[$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05];[$種類番号.$A$1:$種類番号.$B$4];2;0)" office:value-type="float" office:value="1" calcext:value-type="float">
            <text:p>1</text:p>
          </table:table-cell>
          <table:table-cell office:value-type="string" calcext:value-type="string">
            <text:p>赤</text:p>
          </table:table-cell>
          <table:table-cell table:style-name="ce11" table:formula="of:=VLOOKUP([.N405];[$色番号.$A$1:$色番号.$B$10];2;0)" office:value-type="float" office:value="1" calcext:value-type="float">
            <text:p>1</text:p>
          </table:table-cell>
          <table:table-cell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05];[$特性番号.$A$1:$特性番号.$B$8];2;0);0)" office:value-type="float" office:value="0" calcext:value-type="float">
            <text:p>0</text:p>
          </table:table-cell>
          <table:table-cell office:value-type="string" calcext:value-type="string">
            <text:p>この能力は、これが破壊されたとき、自分の手札のレベル6以下の「即応」を持つイジン1体を相手に見せて発動できる。そのイジンを戦場に置く。</text:p>
          </table:table-cell>
          <table:table-cell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405];[$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14.png</text:p>
          </table:table-cell>
          <table:table-cell table:style-name="ce11" table:formula="of:=CONCATENATE([$JSON.$A$1];[.$C405];[$JSON.$B$1];[.$E405];[$JSON.$C$1];[.F405];[$JSON.$D$1];[.$G405];[$JSON.$E$1];IF(ISNA([.$T405]);&quot;null&quot;;&quot;&quot;&quot;&quot;&amp;[.$T405]&amp;&quot;&quot;&quot;&quot;);[$JSON.$F$1];[.$V405];[$JSON.$G$1];IF(ISNA([.$X405]);&quot;null&quot;;&quot;&quot;&quot;&quot;&amp;[.$X405]&amp;&quot;&quot;&quot;&quot;);[$JSON.$H$1];[.$AA405];[$JSON.$I$1];[.$I405];[$JSON.$J$1];[.K405];[$JSON.$K$1];[.$M405];[$JSON.$L$1];[.$P405];[$JSON.$M$1];[.$O405];[$JSON.$N$1];[.$S405];[$JSON.$O$1];[.$U405];[$JSON.$P$1];IF(ISNA([.$W405]);&quot;null&quot;;[.$W405]);[$JSON.$Q$1];[.$Y405];[$JSON.$R$1];IF([.$Z405];&quot;true&quot;;&quot;false&quot;);[$JSON.$S$1];[.$A405];[$JSON.$T$1];[.$B405];[$JSON.$U$1])" office:value-type="string" office:string-value="{&quot;id&quot;:&quot;2nd1-14&quot;,&quot;name&quot;:&quot;フィリッポス2世&quot;,&quot;displayName&quot;:&quot;フィリッポス2世&quot;,&quot;kana&quot;:&quot;ふぃりっぽすにせい&quot;,&quot;traitText&quot;:null,&quot;ruleText&quot;:&quot;この能力は、これが破壊されたとき、自分の手札のレベル6以下の「即応」を持つイジン1体を相手に見せて発動できる。そのイジンを戦場に置く。&quot;,&quot;legacyText&quot;:null,&quot;imageUrl&quot;:&quot;https://one-draw.jp/ijinden/cardlist/005/card/05_014.png&quot;,&quot;expansion&quot;:55,&quot;rarity&quot;:1,&quot;type&quot;:1,&quot;level&quot;:5,&quot;color&quot;:1,&quot;term&quot;:0,&quot;trait&quot;:0,&quot;power&quot;:5000,&quot;legacy&quot;:0,&quot;anyNumCopies&quot;:false,&quot;orderTable&quot;:404,&quot;orderDeck&quot;:193}," calcext:value-type="string">
            <text:p>{"id":"2nd1-14","name":"フィリッポス2世","displayName":"フィリッポス2世","kana":"ふぃりっぽすにせい","traitText":null,"ruleText":"この能力は、これが破壊されたとき、自分の手札のレベル6以下の「即応」を持つイジン1体を相手に見せて発動できる。そのイジンを戦場に置く。","legacyText":null,"imageUrl":"https://one-draw.jp/ijinden/cardlist/005/card/05_014.png","expansion":55,"rarity":1,"type":1,"level":5,"color":1,"term":0,"trait":0,"power":5000,"legacy":0,"anyNumCopies":false,"orderTable":404,"orderDeck":193},</text:p>
          </table:table-cell>
          <table:table-cell table:number-columns-repeated="16356"/>
        </table:table-row>
        <table:table-row table:style-name="ro2">
          <table:table-cell table:style-name="ce11" office:value-type="float" office:value="405" calcext:value-type="float">
            <text:p>405</text:p>
          </table:table-cell>
          <table:table-cell table:style-name="ce11" office:value-type="float" office:value="93" calcext:value-type="float">
            <text:p>93</text:p>
          </table:table-cell>
          <table:table-cell table:formula="of:=CONCATENATE(&quot;2nd1-&quot;;TEXT([.D406];&quot;0&quot;))" office:value-type="string" office:string-value="2nd1-15" calcext:value-type="string">
            <text:p>2nd1-15</text:p>
          </table:table-cell>
          <table:table-cell office:value-type="float" office:value="15" calcext:value-type="float">
            <text:p>15</text:p>
          </table:table-cell>
          <table:table-cell office:value-type="string" calcext:value-type="string">
            <text:p>相馬義胤</text:p>
          </table:table-cell>
          <table:table-cell table:style-name="ce11" table:formula="of:=[.E406]" office:value-type="string" office:string-value="相馬義胤" calcext:value-type="string">
            <text:p>相馬義胤</text:p>
          </table:table-cell>
          <table:table-cell office:value-type="string" calcext:value-type="string">
            <text:p>そうまよしたね</text:p>
          </table:table-cell>
          <table:table-cell table:style-name="ce11" office:value-type="string" calcext:value-type="string">
            <text:p>第５弾ブースターパック</text:p>
          </table:table-cell>
          <table:table-cell table:style-name="ce11" table:formula="of:=VLOOKUP([.H406];[$収録番号.$A$1:$収録番号.$B$10];2;0)" office:value-type="float" office:value="55" calcext:value-type="float">
            <text:p>55</text:p>
          </table:table-cell>
          <table:table-cell office:value-type="string" calcext:value-type="string">
            <text:p>N</text:p>
          </table:table-cell>
          <table:table-cell table:style-name="ce11" table:formula="of:=VLOOKUP([.J406];[$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06];[$種類番号.$A$1:$種類番号.$B$4];2;0)" office:value-type="float" office:value="1" calcext:value-type="float">
            <text:p>1</text:p>
          </table:table-cell>
          <table:table-cell office:value-type="string" calcext:value-type="string">
            <text:p>赤</text:p>
          </table:table-cell>
          <table:table-cell table:style-name="ce11" table:formula="of:=VLOOKUP([.N406];[$色番号.$A$1:$色番号.$B$10];2;0)" office:value-type="float" office:value="1" calcext:value-type="float">
            <text:p>1</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office:value-type="string" calcext:value-type="string">
            <text:p>勝鬨</text:p>
          </table:table-cell>
          <table:table-cell table:style-name="ce11" table:formula="of:=IFERROR(VLOOKUP([.$R406];[$能力語番号.$A$1:$能力語番号.$B$11];2;0);0)" office:value-type="float" office:value="1024" calcext:value-type="float">
            <text:p>1024</text:p>
          </table:table-cell>
          <table:table-cell office:value-type="string" calcext:value-type="string">
            <text:p>剣術</text:p>
          </table:table-cell>
          <table:table-cell table:style-name="ce11" table:formula="of:=IFERROR(VLOOKUP([.$T406];[$特性番号.$A$1:$特性番号.$B$8];2;0);0)" office:value-type="float" office:value="1" calcext:value-type="float">
            <text:p>1</text:p>
          </table:table-cell>
          <table:table-cell office:value-type="string" calcext:value-type="string">
            <text:p>勝鬨 - この能力は、これがアタッカーなら、これがバトル解決で勝ったときに発動する。自分の墓地のマホウ1つを手札に戻す。¶アタック+2000</text:p>
          </table:table-cell>
          <table:table-cell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06];[$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15.png</text:p>
          </table:table-cell>
          <table:table-cell table:style-name="ce11" table:formula="of:=CONCATENATE([$JSON.$A$1];[.$C406];[$JSON.$B$1];[.$E406];[$JSON.$C$1];[.F406];[$JSON.$D$1];[.$G406];[$JSON.$E$1];IF(ISNA([.$T406]);&quot;null&quot;;&quot;&quot;&quot;&quot;&amp;[.$T406]&amp;&quot;&quot;&quot;&quot;);[$JSON.$F$1];[.$V406];[$JSON.$G$1];IF(ISNA([.$X406]);&quot;null&quot;;&quot;&quot;&quot;&quot;&amp;[.$X406]&amp;&quot;&quot;&quot;&quot;);[$JSON.$H$1];[.$AA406];[$JSON.$I$1];[.$I406];[$JSON.$J$1];[.K406];[$JSON.$K$1];[.$M406];[$JSON.$L$1];[.$P406];[$JSON.$M$1];[.$O406];[$JSON.$N$1];[.$S406];[$JSON.$O$1];[.$U406];[$JSON.$P$1];IF(ISNA([.$W406]);&quot;null&quot;;[.$W406]);[$JSON.$Q$1];[.$Y406];[$JSON.$R$1];IF([.$Z406];&quot;true&quot;;&quot;false&quot;);[$JSON.$S$1];[.$A406];[$JSON.$T$1];[.$B406];[$JSON.$U$1])" office:value-type="string" office:string-value="{&quot;id&quot;:&quot;2nd1-15&quot;,&quot;name&quot;:&quot;相馬義胤&quot;,&quot;displayName&quot;:&quot;相馬義胤&quot;,&quot;kana&quot;:&quot;そうまよしたね&quot;,&quot;traitText&quot;:&quot;剣術&quot;,&quot;ruleText&quot;:&quot;勝鬨 - この能力は、これがアタッカーなら、これがバトル解決で勝ったときに発動する。自分の墓地のマホウ1つを手札に戻す。¶アタック+2000&quot;,&quot;legacyText&quot;:null,&quot;imageUrl&quot;:&quot;https://one-draw.jp/ijinden/cardlist/005/card/05_015.png&quot;,&quot;expansion&quot;:55,&quot;rarity&quot;:1,&quot;type&quot;:1,&quot;level&quot;:3,&quot;color&quot;:1,&quot;term&quot;:1024,&quot;trait&quot;:1,&quot;power&quot;:3000,&quot;legacy&quot;:0,&quot;anyNumCopies&quot;:false,&quot;orderTable&quot;:405,&quot;orderDeck&quot;:93}," calcext:value-type="string">
            <text:p>{"id":"2nd1-15","name":"相馬義胤","displayName":"相馬義胤","kana":"そうまよしたね","traitText":"剣術","ruleText":"勝鬨 - この能力は、これがアタッカーなら、これがバトル解決で勝ったときに発動する。自分の墓地のマホウ1つを手札に戻す。¶アタック+2000","legacyText":null,"imageUrl":"https://one-draw.jp/ijinden/cardlist/005/card/05_015.png","expansion":55,"rarity":1,"type":1,"level":3,"color":1,"term":1024,"trait":1,"power":3000,"legacy":0,"anyNumCopies":false,"orderTable":405,"orderDeck":93},</text:p>
          </table:table-cell>
          <table:table-cell table:number-columns-repeated="16356"/>
        </table:table-row>
        <table:table-row table:style-name="ro2">
          <table:table-cell table:style-name="ce11" office:value-type="float" office:value="406" calcext:value-type="float">
            <text:p>406</text:p>
          </table:table-cell>
          <table:table-cell table:style-name="ce11" office:value-type="float" office:value="144" calcext:value-type="float">
            <text:p>144</text:p>
          </table:table-cell>
          <table:table-cell table:formula="of:=CONCATENATE(&quot;2nd1-&quot;;TEXT([.D407];&quot;0&quot;))" office:value-type="string" office:string-value="2nd1-16" calcext:value-type="string">
            <text:p>2nd1-16</text:p>
          </table:table-cell>
          <table:table-cell office:value-type="float" office:value="16" calcext:value-type="float">
            <text:p>16</text:p>
          </table:table-cell>
          <table:table-cell office:value-type="string" calcext:value-type="string">
            <text:p>サミュエル・クロンプトン</text:p>
          </table:table-cell>
          <table:table-cell table:style-name="ce11" table:formula="of:=[.E407]" office:value-type="string" office:string-value="サミュエル・クロンプトン" calcext:value-type="string">
            <text:p>サミュエル・クロンプトン</text:p>
          </table:table-cell>
          <table:table-cell office:value-type="string" calcext:value-type="string">
            <text:p>さみゅえるくろんぷとん</text:p>
          </table:table-cell>
          <table:table-cell table:style-name="ce11" office:value-type="string" calcext:value-type="string">
            <text:p>第５弾ブースターパック</text:p>
          </table:table-cell>
          <table:table-cell table:style-name="ce11" table:formula="of:=VLOOKUP([.H407];[$収録番号.$A$1:$収録番号.$B$10];2;0)" office:value-type="float" office:value="55" calcext:value-type="float">
            <text:p>55</text:p>
          </table:table-cell>
          <table:table-cell office:value-type="string" calcext:value-type="string">
            <text:p>R</text:p>
          </table:table-cell>
          <table:table-cell table:style-name="ce11" table:formula="of:=VLOOKUP([.J407];[$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07];[$種類番号.$A$1:$種類番号.$B$4];2;0)" office:value-type="float" office:value="1" calcext:value-type="float">
            <text:p>1</text:p>
          </table:table-cell>
          <table:table-cell office:value-type="string" calcext:value-type="string">
            <text:p>赤</text:p>
          </table:table-cell>
          <table:table-cell table:style-name="ce11" table:formula="of:=VLOOKUP([.N407];[$色番号.$A$1:$色番号.$B$10];2;0)" office:value-type="float" office:value="1" calcext:value-type="float">
            <text:p>1</text:p>
          </table:table-cell>
          <table:table-cell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07];[$特性番号.$A$1:$特性番号.$B$8];2;0);0)" office:value-type="float" office:value="0" calcext:value-type="float">
            <text:p>0</text:p>
          </table:table-cell>
          <table:table-cell office:value-type="string" calcext:value-type="string">
            <text:p>この能力は、自分の魔力ゾーンに色が3つ以上あるなら、これが戦場に置かれたときに発動する。相手の戦場のレベル4以下のカードすべてを破壊する。</text:p>
          </table:table-cell>
          <table:table-cell office:value-type="float" office:value="3000" calcext:value-type="float">
            <text:p>3000</text:p>
          </table:table-cell>
          <table:table-cell office:value-type="string" calcext:value-type="string">
            <text:p>1ドローする</text:p>
          </table:table-cell>
          <table:table-cell table:style-name="ce11" table:formula="of:=IFERROR(VLOOKUP([.$X407];[$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16.png</text:p>
          </table:table-cell>
          <table:table-cell table:style-name="ce11" table:formula="of:=CONCATENATE([$JSON.$A$1];[.$C407];[$JSON.$B$1];[.$E407];[$JSON.$C$1];[.F407];[$JSON.$D$1];[.$G407];[$JSON.$E$1];IF(ISNA([.$T407]);&quot;null&quot;;&quot;&quot;&quot;&quot;&amp;[.$T407]&amp;&quot;&quot;&quot;&quot;);[$JSON.$F$1];[.$V407];[$JSON.$G$1];IF(ISNA([.$X407]);&quot;null&quot;;&quot;&quot;&quot;&quot;&amp;[.$X407]&amp;&quot;&quot;&quot;&quot;);[$JSON.$H$1];[.$AA407];[$JSON.$I$1];[.$I407];[$JSON.$J$1];[.K407];[$JSON.$K$1];[.$M407];[$JSON.$L$1];[.$P407];[$JSON.$M$1];[.$O407];[$JSON.$N$1];[.$S407];[$JSON.$O$1];[.$U407];[$JSON.$P$1];IF(ISNA([.$W407]);&quot;null&quot;;[.$W407]);[$JSON.$Q$1];[.$Y407];[$JSON.$R$1];IF([.$Z407];&quot;true&quot;;&quot;false&quot;);[$JSON.$S$1];[.$A407];[$JSON.$T$1];[.$B407];[$JSON.$U$1])" office:value-type="string" office:string-value="{&quot;id&quot;:&quot;2nd1-16&quot;,&quot;name&quot;:&quot;サミュエル・クロンプトン&quot;,&quot;displayName&quot;:&quot;サミュエル・クロンプトン&quot;,&quot;kana&quot;:&quot;さみゅえるくろんぷとん&quot;,&quot;traitText&quot;:null,&quot;ruleText&quot;:&quot;この能力は、自分の魔力ゾーンに色が3つ以上あるなら、これが戦場に置かれたときに発動する。相手の戦場のレベル4以下のカードすべてを破壊する。&quot;,&quot;legacyText&quot;:&quot;1ドローする&quot;,&quot;imageUrl&quot;:&quot;https://one-draw.jp/ijinden/cardlist/005/card/05_016.png&quot;,&quot;expansion&quot;:55,&quot;rarity&quot;:2,&quot;type&quot;:1,&quot;level&quot;:4,&quot;color&quot;:1,&quot;term&quot;:0,&quot;trait&quot;:0,&quot;power&quot;:3000,&quot;legacy&quot;:4,&quot;anyNumCopies&quot;:false,&quot;orderTable&quot;:406,&quot;orderDeck&quot;:144}," calcext:value-type="string">
            <text:p>{"id":"2nd1-16","name":"サミュエル・クロンプトン","displayName":"サミュエル・クロンプトン","kana":"さみゅえるくろんぷとん","traitText":null,"ruleText":"この能力は、自分の魔力ゾーンに色が3つ以上あるなら、これが戦場に置かれたときに発動する。相手の戦場のレベル4以下のカードすべてを破壊する。","legacyText":"1ドローする","imageUrl":"https://one-draw.jp/ijinden/cardlist/005/card/05_016.png","expansion":55,"rarity":2,"type":1,"level":4,"color":1,"term":0,"trait":0,"power":3000,"legacy":4,"anyNumCopies":false,"orderTable":406,"orderDeck":144},</text:p>
          </table:table-cell>
          <table:table-cell table:number-columns-repeated="16356"/>
        </table:table-row>
        <table:table-row table:style-name="ro2">
          <table:table-cell table:style-name="ce11" office:value-type="float" office:value="407" calcext:value-type="float">
            <text:p>407</text:p>
          </table:table-cell>
          <table:table-cell table:style-name="ce11" office:value-type="float" office:value="234" calcext:value-type="float">
            <text:p>234</text:p>
          </table:table-cell>
          <table:table-cell table:formula="of:=CONCATENATE(&quot;2nd1-&quot;;TEXT([.D408];&quot;0&quot;))" office:value-type="string" office:string-value="2nd1-17" calcext:value-type="string">
            <text:p>2nd1-17</text:p>
          </table:table-cell>
          <table:table-cell office:value-type="float" office:value="17" calcext:value-type="float">
            <text:p>17</text:p>
          </table:table-cell>
          <table:table-cell office:value-type="string" calcext:value-type="string">
            <text:p>真田信繁</text:p>
          </table:table-cell>
          <table:table-cell table:style-name="ce11" table:formula="of:=[.E408]" office:value-type="string" office:string-value="真田信繁" calcext:value-type="string">
            <text:p>真田信繁</text:p>
          </table:table-cell>
          <table:table-cell office:value-type="string" calcext:value-type="string">
            <text:p>さなだのぶしげ</text:p>
          </table:table-cell>
          <table:table-cell table:style-name="ce11" office:value-type="string" calcext:value-type="string">
            <text:p>第５弾ブースターパック</text:p>
          </table:table-cell>
          <table:table-cell table:style-name="ce11" table:formula="of:=VLOOKUP([.H408];[$収録番号.$A$1:$収録番号.$B$10];2;0)" office:value-type="float" office:value="55" calcext:value-type="float">
            <text:p>55</text:p>
          </table:table-cell>
          <table:table-cell office:value-type="string" calcext:value-type="string">
            <text:p>R</text:p>
          </table:table-cell>
          <table:table-cell table:style-name="ce11" table:formula="of:=VLOOKUP([.J408];[$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08];[$種類番号.$A$1:$種類番号.$B$4];2;0)" office:value-type="float" office:value="1" calcext:value-type="float">
            <text:p>1</text:p>
          </table:table-cell>
          <table:table-cell office:value-type="string" calcext:value-type="string">
            <text:p>赤</text:p>
          </table:table-cell>
          <table:table-cell table:style-name="ce11" table:formula="of:=VLOOKUP([.N408];[$色番号.$A$1:$色番号.$B$10];2;0)" office:value-type="float" office:value="1" calcext:value-type="float">
            <text:p>1</text:p>
          </table:table-cell>
          <table:table-cell office:value-type="float" office:value="6" calcext:value-type="float">
            <text:p>6</text:p>
          </table:table-cell>
          <table:table-cell table:style-name="ce11" table:formula="of:=NA()" office:value-type="string" office:string-value="" calcext:value-type="error">
            <text:p>#N/A</text:p>
          </table:table-cell>
          <table:table-cell table:style-name="ce11" office:value-type="string" calcext:value-type="string">
            <text:p>勝鬨</text:p>
          </table:table-cell>
          <table:table-cell table:style-name="ce11" table:formula="of:=IFERROR(VLOOKUP([.$R408];[$能力語番号.$A$1:$能力語番号.$B$11];2;0);0)" office:value-type="float" office:value="1024" calcext:value-type="float">
            <text:p>1024</text:p>
          </table:table-cell>
          <table:table-cell office:value-type="string" calcext:value-type="string">
            <text:p>剣術</text:p>
          </table:table-cell>
          <table:table-cell table:style-name="ce11" table:formula="of:=IFERROR(VLOOKUP([.$T408];[$特性番号.$A$1:$特性番号.$B$8];2;0);0)" office:value-type="float" office:value="1" calcext:value-type="float">
            <text:p>1</text:p>
          </table:table-cell>
          <table:table-cell office:value-type="string" calcext:value-type="string">
            <text:p>勝鬨 - この能力は、これがアタッカーなら、これがバトル解決で勝ったときに発動する。自分と相手の戦場の「剣術」を持たないイジンすべてを破壊する。¶アタック+4000</text:p>
          </table:table-cell>
          <table:table-cell office:value-type="float" office:value="4000" calcext:value-type="float">
            <text:p>4000</text:p>
          </table:table-cell>
          <table:table-cell table:style-name="ce25" table:formula="of:=NA()" office:value-type="string" office:string-value="" calcext:value-type="error">
            <text:p>#N/A</text:p>
          </table:table-cell>
          <table:table-cell table:style-name="ce11" table:formula="of:=IFERROR(VLOOKUP([.$X408];[$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17.png</text:p>
          </table:table-cell>
          <table:table-cell table:style-name="ce11" table:formula="of:=CONCATENATE([$JSON.$A$1];[.$C408];[$JSON.$B$1];[.$E408];[$JSON.$C$1];[.F408];[$JSON.$D$1];[.$G408];[$JSON.$E$1];IF(ISNA([.$T408]);&quot;null&quot;;&quot;&quot;&quot;&quot;&amp;[.$T408]&amp;&quot;&quot;&quot;&quot;);[$JSON.$F$1];[.$V408];[$JSON.$G$1];IF(ISNA([.$X408]);&quot;null&quot;;&quot;&quot;&quot;&quot;&amp;[.$X408]&amp;&quot;&quot;&quot;&quot;);[$JSON.$H$1];[.$AA408];[$JSON.$I$1];[.$I408];[$JSON.$J$1];[.K408];[$JSON.$K$1];[.$M408];[$JSON.$L$1];[.$P408];[$JSON.$M$1];[.$O408];[$JSON.$N$1];[.$S408];[$JSON.$O$1];[.$U408];[$JSON.$P$1];IF(ISNA([.$W408]);&quot;null&quot;;[.$W408]);[$JSON.$Q$1];[.$Y408];[$JSON.$R$1];IF([.$Z408];&quot;true&quot;;&quot;false&quot;);[$JSON.$S$1];[.$A408];[$JSON.$T$1];[.$B408];[$JSON.$U$1])" office:value-type="string" office:string-value="{&quot;id&quot;:&quot;2nd1-17&quot;,&quot;name&quot;:&quot;真田信繁&quot;,&quot;displayName&quot;:&quot;真田信繁&quot;,&quot;kana&quot;:&quot;さなだのぶしげ&quot;,&quot;traitText&quot;:&quot;剣術&quot;,&quot;ruleText&quot;:&quot;勝鬨 - この能力は、これがアタッカーなら、これがバトル解決で勝ったときに発動する。自分と相手の戦場の「剣術」を持たないイジンすべてを破壊する。¶アタック+4000&quot;,&quot;legacyText&quot;:null,&quot;imageUrl&quot;:&quot;https://one-draw.jp/ijinden/cardlist/005/card/05_017.png&quot;,&quot;expansion&quot;:55,&quot;rarity&quot;:2,&quot;type&quot;:1,&quot;level&quot;:6,&quot;color&quot;:1,&quot;term&quot;:1024,&quot;trait&quot;:1,&quot;power&quot;:4000,&quot;legacy&quot;:0,&quot;anyNumCopies&quot;:false,&quot;orderTable&quot;:407,&quot;orderDeck&quot;:234}," calcext:value-type="string">
            <text:p>{"id":"2nd1-17","name":"真田信繁","displayName":"真田信繁","kana":"さなだのぶしげ","traitText":"剣術","ruleText":"勝鬨 - この能力は、これがアタッカーなら、これがバトル解決で勝ったときに発動する。自分と相手の戦場の「剣術」を持たないイジンすべてを破壊する。¶アタック+4000","legacyText":null,"imageUrl":"https://one-draw.jp/ijinden/cardlist/005/card/05_017.png","expansion":55,"rarity":2,"type":1,"level":6,"color":1,"term":1024,"trait":1,"power":4000,"legacy":0,"anyNumCopies":false,"orderTable":407,"orderDeck":234},</text:p>
          </table:table-cell>
          <table:table-cell table:number-columns-repeated="16356"/>
        </table:table-row>
        <table:table-row table:style-name="ro2">
          <table:table-cell table:style-name="ce11" office:value-type="float" office:value="408" calcext:value-type="float">
            <text:p>408</text:p>
          </table:table-cell>
          <table:table-cell table:style-name="ce11" office:value-type="float" office:value="40" calcext:value-type="float">
            <text:p>40</text:p>
          </table:table-cell>
          <table:table-cell table:formula="of:=CONCATENATE(&quot;2nd1-&quot;;TEXT([.D409];&quot;0&quot;))" office:value-type="string" office:string-value="2nd1-18" calcext:value-type="string">
            <text:p>2nd1-18</text:p>
          </table:table-cell>
          <table:table-cell office:value-type="float" office:value="18" calcext:value-type="float">
            <text:p>18</text:p>
          </table:table-cell>
          <table:table-cell office:value-type="string" calcext:value-type="string">
            <text:p>黒田官兵衛</text:p>
          </table:table-cell>
          <table:table-cell table:style-name="ce11" table:formula="of:=[.E409]" office:value-type="string" office:string-value="黒田官兵衛" calcext:value-type="string">
            <text:p>黒田官兵衛</text:p>
          </table:table-cell>
          <table:table-cell office:value-type="string" calcext:value-type="string">
            <text:p>くろだかんべえ</text:p>
          </table:table-cell>
          <table:table-cell table:style-name="ce11" office:value-type="string" calcext:value-type="string">
            <text:p>第５弾ブースターパック</text:p>
          </table:table-cell>
          <table:table-cell table:style-name="ce11" table:formula="of:=VLOOKUP([.H409];[$収録番号.$A$1:$収録番号.$B$10];2;0)" office:value-type="float" office:value="55" calcext:value-type="float">
            <text:p>55</text:p>
          </table:table-cell>
          <table:table-cell office:value-type="string" calcext:value-type="string">
            <text:p>R</text:p>
          </table:table-cell>
          <table:table-cell table:style-name="ce11" table:formula="of:=VLOOKUP([.J409];[$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09];[$種類番号.$A$1:$種類番号.$B$4];2;0)" office:value-type="float" office:value="1" calcext:value-type="float">
            <text:p>1</text:p>
          </table:table-cell>
          <table:table-cell office:value-type="string" calcext:value-type="string">
            <text:p>赤</text:p>
          </table:table-cell>
          <table:table-cell table:style-name="ce11" table:formula="of:=VLOOKUP([.N409];[$色番号.$A$1:$色番号.$B$10];2;0)" office:value-type="float" office:value="1" calcext:value-type="float">
            <text:p>1</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09];[$能力語番号.$A$1:$能力語番号.$B$11];2;0);0)" office:value-type="float" office:value="0" calcext:value-type="float">
            <text:p>0</text:p>
          </table:table-cell>
          <table:table-cell office:value-type="string" calcext:value-type="string">
            <text:p>剣術</text:p>
          </table:table-cell>
          <table:table-cell table:style-name="ce11" table:formula="of:=IFERROR(VLOOKUP([.$T409];[$特性番号.$A$1:$特性番号.$B$8];2;0);0)" office:value-type="float" office:value="1" calcext:value-type="float">
            <text:p>1</text:p>
          </table:table-cell>
          <table:table-cell office:value-type="string" calcext:value-type="string">
            <text:p>この能力は、これが起きているなら、戦場で効果を発揮する。相手の戦場のハイケイは能力すべてを失う。この能力は能力によって失われない。</text:p>
          </table:table-cell>
          <table:table-cell office:value-type="float" office:value="1000" calcext:value-type="float">
            <text:p>1000</text:p>
          </table:table-cell>
          <table:table-cell office:value-type="string" calcext:value-type="string">
            <text:p>1ドローする</text:p>
          </table:table-cell>
          <table:table-cell table:style-name="ce11" table:formula="of:=IFERROR(VLOOKUP([.$X409];[$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18.png</text:p>
          </table:table-cell>
          <table:table-cell table:style-name="ce11" table:formula="of:=CONCATENATE([$JSON.$A$1];[.$C409];[$JSON.$B$1];[.$E409];[$JSON.$C$1];[.F409];[$JSON.$D$1];[.$G409];[$JSON.$E$1];IF(ISNA([.$T409]);&quot;null&quot;;&quot;&quot;&quot;&quot;&amp;[.$T409]&amp;&quot;&quot;&quot;&quot;);[$JSON.$F$1];[.$V409];[$JSON.$G$1];IF(ISNA([.$X409]);&quot;null&quot;;&quot;&quot;&quot;&quot;&amp;[.$X409]&amp;&quot;&quot;&quot;&quot;);[$JSON.$H$1];[.$AA409];[$JSON.$I$1];[.$I409];[$JSON.$J$1];[.K409];[$JSON.$K$1];[.$M409];[$JSON.$L$1];[.$P409];[$JSON.$M$1];[.$O409];[$JSON.$N$1];[.$S409];[$JSON.$O$1];[.$U409];[$JSON.$P$1];IF(ISNA([.$W409]);&quot;null&quot;;[.$W409]);[$JSON.$Q$1];[.$Y409];[$JSON.$R$1];IF([.$Z409];&quot;true&quot;;&quot;false&quot;);[$JSON.$S$1];[.$A409];[$JSON.$T$1];[.$B409];[$JSON.$U$1])" office:value-type="string" office:string-value="{&quot;id&quot;:&quot;2nd1-18&quot;,&quot;name&quot;:&quot;黒田官兵衛&quot;,&quot;displayName&quot;:&quot;黒田官兵衛&quot;,&quot;kana&quot;:&quot;くろだかんべえ&quot;,&quot;traitText&quot;:&quot;剣術&quot;,&quot;ruleText&quot;:&quot;この能力は、これが起きているなら、戦場で効果を発揮する。相手の戦場のハイケイは能力すべてを失う。この能力は能力によって失われない。&quot;,&quot;legacyText&quot;:&quot;1ドローする&quot;,&quot;imageUrl&quot;:&quot;https://one-draw.jp/ijinden/cardlist/005/card/05_018.png&quot;,&quot;expansion&quot;:55,&quot;rarity&quot;:2,&quot;type&quot;:1,&quot;level&quot;:2,&quot;color&quot;:1,&quot;term&quot;:0,&quot;trait&quot;:1,&quot;power&quot;:1000,&quot;legacy&quot;:4,&quot;anyNumCopies&quot;:false,&quot;orderTable&quot;:408,&quot;orderDeck&quot;:40}," calcext:value-type="string">
            <text:p>{"id":"2nd1-18","name":"黒田官兵衛","displayName":"黒田官兵衛","kana":"くろだかんべえ","traitText":"剣術","ruleText":"この能力は、これが起きているなら、戦場で効果を発揮する。相手の戦場のハイケイは能力すべてを失う。この能力は能力によって失われない。","legacyText":"1ドローする","imageUrl":"https://one-draw.jp/ijinden/cardlist/005/card/05_018.png","expansion":55,"rarity":2,"type":1,"level":2,"color":1,"term":0,"trait":1,"power":1000,"legacy":4,"anyNumCopies":false,"orderTable":408,"orderDeck":40},</text:p>
          </table:table-cell>
          <table:table-cell table:number-columns-repeated="16356"/>
        </table:table-row>
        <table:table-row table:style-name="ro2">
          <table:table-cell table:style-name="ce11" office:value-type="float" office:value="409" calcext:value-type="float">
            <text:p>409</text:p>
          </table:table-cell>
          <table:table-cell table:style-name="ce11" office:value-type="float" office:value="235" calcext:value-type="float">
            <text:p>235</text:p>
          </table:table-cell>
          <table:table-cell table:formula="of:=CONCATENATE(&quot;2nd1-&quot;;TEXT([.D410];&quot;0&quot;))" office:value-type="string" office:string-value="2nd1-19" calcext:value-type="string">
            <text:p>2nd1-19</text:p>
          </table:table-cell>
          <table:table-cell office:value-type="float" office:value="19" calcext:value-type="float">
            <text:p>19</text:p>
          </table:table-cell>
          <table:table-cell office:value-type="string" calcext:value-type="string">
            <text:p>アレクサンドロス大王</text:p>
          </table:table-cell>
          <table:table-cell office:value-type="string" calcext:value-type="string">
            <text:p>アレクサンドロス大王 (第5弾)</text:p>
          </table:table-cell>
          <table:table-cell office:value-type="string" calcext:value-type="string">
            <text:p>あれくさんどろすだいおう</text:p>
          </table:table-cell>
          <table:table-cell table:style-name="ce11" office:value-type="string" calcext:value-type="string">
            <text:p>第５弾ブースターパック</text:p>
          </table:table-cell>
          <table:table-cell table:style-name="ce11" table:formula="of:=VLOOKUP([.H410];[$収録番号.$A$1:$収録番号.$B$10];2;0)" office:value-type="float" office:value="55" calcext:value-type="float">
            <text:p>55</text:p>
          </table:table-cell>
          <table:table-cell office:value-type="string" calcext:value-type="string">
            <text:p>N</text:p>
          </table:table-cell>
          <table:table-cell table:style-name="ce11" table:formula="of:=VLOOKUP([.J410];[$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10];[$種類番号.$A$1:$種類番号.$B$4];2;0)" office:value-type="float" office:value="1" calcext:value-type="float">
            <text:p>1</text:p>
          </table:table-cell>
          <table:table-cell office:value-type="string" calcext:value-type="string">
            <text:p>赤</text:p>
          </table:table-cell>
          <table:table-cell table:style-name="ce11" table:formula="of:=VLOOKUP([.N410];[$色番号.$A$1:$色番号.$B$10];2;0)" office:value-type="float" office:value="1" calcext:value-type="float">
            <text:p>1</text:p>
          </table:table-cell>
          <table:table-cell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1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10];[$特性番号.$A$1:$特性番号.$B$8];2;0);0)" office:value-type="float" office:value="0" calcext:value-type="float">
            <text:p>0</text:p>
          </table:table-cell>
          <table:table-cell office:value-type="string" calcext:value-type="string">
            <text:p>この能力は、これがアタッカーになったときに発動する。アタッカー1体につき1つ、相手の戦場のハイケイを破壊する。¶即応</text:p>
          </table:table-cell>
          <table:table-cell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410];[$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19.png</text:p>
          </table:table-cell>
          <table:table-cell table:style-name="ce11" table:formula="of:=CONCATENATE([$JSON.$A$1];[.$C410];[$JSON.$B$1];[.$E410];[$JSON.$C$1];[.F410];[$JSON.$D$1];[.$G410];[$JSON.$E$1];IF(ISNA([.$T410]);&quot;null&quot;;&quot;&quot;&quot;&quot;&amp;[.$T410]&amp;&quot;&quot;&quot;&quot;);[$JSON.$F$1];[.$V410];[$JSON.$G$1];IF(ISNA([.$X410]);&quot;null&quot;;&quot;&quot;&quot;&quot;&amp;[.$X410]&amp;&quot;&quot;&quot;&quot;);[$JSON.$H$1];[.$AA410];[$JSON.$I$1];[.$I410];[$JSON.$J$1];[.K410];[$JSON.$K$1];[.$M410];[$JSON.$L$1];[.$P410];[$JSON.$M$1];[.$O410];[$JSON.$N$1];[.$S410];[$JSON.$O$1];[.$U410];[$JSON.$P$1];IF(ISNA([.$W410]);&quot;null&quot;;[.$W410]);[$JSON.$Q$1];[.$Y410];[$JSON.$R$1];IF([.$Z410];&quot;true&quot;;&quot;false&quot;);[$JSON.$S$1];[.$A410];[$JSON.$T$1];[.$B410];[$JSON.$U$1])" office:value-type="string" office:string-value="{&quot;id&quot;:&quot;2nd1-19&quot;,&quot;name&quot;:&quot;アレクサンドロス大王&quot;,&quot;displayName&quot;:&quot;アレクサンドロス大王 (第5弾)&quot;,&quot;kana&quot;:&quot;あれくさんどろすだいおう&quot;,&quot;traitText&quot;:null,&quot;ruleText&quot;:&quot;この能力は、これがアタッカーになったときに発動する。アタッカー1体につき1つ、相手の戦場のハイケイを破壊する。¶即応&quot;,&quot;legacyText&quot;:null,&quot;imageUrl&quot;:&quot;https://one-draw.jp/ijinden/cardlist/005/card/05_019.png&quot;,&quot;expansion&quot;:55,&quot;rarity&quot;:1,&quot;type&quot;:1,&quot;level&quot;:6,&quot;color&quot;:1,&quot;term&quot;:0,&quot;trait&quot;:0,&quot;power&quot;:6000,&quot;legacy&quot;:0,&quot;anyNumCopies&quot;:false,&quot;orderTable&quot;:409,&quot;orderDeck&quot;:235}," calcext:value-type="string">
            <text:p>{"id":"2nd1-19","name":"アレクサンドロス大王","displayName":"アレクサンドロス大王 (第5弾)","kana":"あれくさんどろすだいおう","traitText":null,"ruleText":"この能力は、これがアタッカーになったときに発動する。アタッカー1体につき1つ、相手の戦場のハイケイを破壊する。¶即応","legacyText":null,"imageUrl":"https://one-draw.jp/ijinden/cardlist/005/card/05_019.png","expansion":55,"rarity":1,"type":1,"level":6,"color":1,"term":0,"trait":0,"power":6000,"legacy":0,"anyNumCopies":false,"orderTable":409,"orderDeck":235},</text:p>
          </table:table-cell>
          <table:table-cell table:number-columns-repeated="16356"/>
        </table:table-row>
        <table:table-row table:style-name="ro2">
          <table:table-cell table:style-name="ce11" office:value-type="float" office:value="410" calcext:value-type="float">
            <text:p>410</text:p>
          </table:table-cell>
          <table:table-cell table:style-name="ce11" office:value-type="float" office:value="260" calcext:value-type="float">
            <text:p>260</text:p>
          </table:table-cell>
          <table:table-cell table:formula="of:=CONCATENATE(&quot;2nd1-&quot;;TEXT([.D411];&quot;0&quot;))" office:value-type="string" office:string-value="2nd1-20" calcext:value-type="string">
            <text:p>2nd1-20</text:p>
          </table:table-cell>
          <table:table-cell office:value-type="float" office:value="20" calcext:value-type="float">
            <text:p>20</text:p>
          </table:table-cell>
          <table:table-cell office:value-type="string" calcext:value-type="string">
            <text:p>アリストテレス</text:p>
          </table:table-cell>
          <table:table-cell table:style-name="ce11" table:formula="of:=[.E411]" office:value-type="string" office:string-value="アリストテレス" calcext:value-type="string">
            <text:p>アリストテレス</text:p>
          </table:table-cell>
          <table:table-cell office:value-type="string" calcext:value-type="string">
            <text:p>ありすとてれす</text:p>
          </table:table-cell>
          <table:table-cell table:style-name="ce11" office:value-type="string" calcext:value-type="string">
            <text:p>第５弾ブースターパック</text:p>
          </table:table-cell>
          <table:table-cell table:style-name="ce11" table:formula="of:=VLOOKUP([.H411];[$収録番号.$A$1:$収録番号.$B$10];2;0)" office:value-type="float" office:value="55" calcext:value-type="float">
            <text:p>55</text:p>
          </table:table-cell>
          <table:table-cell office:value-type="string" calcext:value-type="string">
            <text:p>N</text:p>
          </table:table-cell>
          <table:table-cell table:style-name="ce11" table:formula="of:=VLOOKUP([.J411];[$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11];[$種類番号.$A$1:$種類番号.$B$4];2;0)" office:value-type="float" office:value="1" calcext:value-type="float">
            <text:p>1</text:p>
          </table:table-cell>
          <table:table-cell office:value-type="string" calcext:value-type="string">
            <text:p>赤</text:p>
          </table:table-cell>
          <table:table-cell table:style-name="ce11" table:formula="of:=VLOOKUP([.N411];[$色番号.$A$1:$色番号.$B$10];2;0)" office:value-type="float" office:value="1" calcext:value-type="float">
            <text:p>1</text:p>
          </table:table-cell>
          <table:table-cell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1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11];[$特性番号.$A$1:$特性番号.$B$8];2;0);0)" office:value-type="float" office:value="0" calcext:value-type="float">
            <text:p>0</text:p>
          </table:table-cell>
          <table:table-cell office:value-type="string" calcext:value-type="string">
            <text:p>この能力は、自分のターンに戦場で効果を発揮する。相手の墓地の「冥府発動」でない遺業能力は発動しない。</text:p>
          </table:table-cell>
          <table:table-cell office:value-type="float" office:value="7000" calcext:value-type="float">
            <text:p>7000</text:p>
          </table:table-cell>
          <table:table-cell office:value-type="string" calcext:value-type="string">
            <text:p>魔力化</text:p>
          </table:table-cell>
          <table:table-cell table:style-name="ce11" table:formula="of:=IFERROR(VLOOKUP([.$X411];[$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20.png</text:p>
          </table:table-cell>
          <table:table-cell table:style-name="ce11" table:formula="of:=CONCATENATE([$JSON.$A$1];[.$C411];[$JSON.$B$1];[.$E411];[$JSON.$C$1];[.F411];[$JSON.$D$1];[.$G411];[$JSON.$E$1];IF(ISNA([.$T411]);&quot;null&quot;;&quot;&quot;&quot;&quot;&amp;[.$T411]&amp;&quot;&quot;&quot;&quot;);[$JSON.$F$1];[.$V411];[$JSON.$G$1];IF(ISNA([.$X411]);&quot;null&quot;;&quot;&quot;&quot;&quot;&amp;[.$X411]&amp;&quot;&quot;&quot;&quot;);[$JSON.$H$1];[.$AA411];[$JSON.$I$1];[.$I411];[$JSON.$J$1];[.K411];[$JSON.$K$1];[.$M411];[$JSON.$L$1];[.$P411];[$JSON.$M$1];[.$O411];[$JSON.$N$1];[.$S411];[$JSON.$O$1];[.$U411];[$JSON.$P$1];IF(ISNA([.$W411]);&quot;null&quot;;[.$W411]);[$JSON.$Q$1];[.$Y411];[$JSON.$R$1];IF([.$Z411];&quot;true&quot;;&quot;false&quot;);[$JSON.$S$1];[.$A411];[$JSON.$T$1];[.$B411];[$JSON.$U$1])" office:value-type="string" office:string-value="{&quot;id&quot;:&quot;2nd1-20&quot;,&quot;name&quot;:&quot;アリストテレス&quot;,&quot;displayName&quot;:&quot;アリストテレス&quot;,&quot;kana&quot;:&quot;ありすとてれす&quot;,&quot;traitText&quot;:null,&quot;ruleText&quot;:&quot;この能力は、自分のターンに戦場で効果を発揮する。相手の墓地の「冥府発動」でない遺業能力は発動しない。&quot;,&quot;legacyText&quot;:&quot;魔力化&quot;,&quot;imageUrl&quot;:&quot;https://one-draw.jp/ijinden/cardlist/005/card/05_020.png&quot;,&quot;expansion&quot;:55,&quot;rarity&quot;:1,&quot;type&quot;:1,&quot;level&quot;:7,&quot;color&quot;:1,&quot;term&quot;:0,&quot;trait&quot;:0,&quot;power&quot;:7000,&quot;legacy&quot;:1,&quot;anyNumCopies&quot;:false,&quot;orderTable&quot;:410,&quot;orderDeck&quot;:260}," calcext:value-type="string">
            <text:p>{"id":"2nd1-20","name":"アリストテレス","displayName":"アリストテレス","kana":"ありすとてれす","traitText":null,"ruleText":"この能力は、自分のターンに戦場で効果を発揮する。相手の墓地の「冥府発動」でない遺業能力は発動しない。","legacyText":"魔力化","imageUrl":"https://one-draw.jp/ijinden/cardlist/005/card/05_020.png","expansion":55,"rarity":1,"type":1,"level":7,"color":1,"term":0,"trait":0,"power":7000,"legacy":1,"anyNumCopies":false,"orderTable":410,"orderDeck":260},</text:p>
          </table:table-cell>
          <table:table-cell table:number-columns-repeated="16356"/>
        </table:table-row>
        <table:table-row table:style-name="ro2">
          <table:table-cell table:style-name="ce11" office:value-type="float" office:value="411" calcext:value-type="float">
            <text:p>411</text:p>
          </table:table-cell>
          <table:table-cell table:style-name="ce11" office:value-type="float" office:value="53" calcext:value-type="float">
            <text:p>53</text:p>
          </table:table-cell>
          <table:table-cell table:formula="of:=CONCATENATE(&quot;2nd1-&quot;;TEXT([.D412];&quot;0&quot;))" office:value-type="string" office:string-value="2nd1-21" calcext:value-type="string">
            <text:p>2nd1-21</text:p>
          </table:table-cell>
          <table:table-cell office:value-type="float" office:value="21" calcext:value-type="float">
            <text:p>21</text:p>
          </table:table-cell>
          <table:table-cell office:value-type="string" calcext:value-type="string">
            <text:p>ジャン・カルヴァン</text:p>
          </table:table-cell>
          <table:table-cell office:value-type="string" calcext:value-type="string">
            <text:p>ジャン・カルヴァン (第5弾)</text:p>
          </table:table-cell>
          <table:table-cell office:value-type="string" calcext:value-type="string">
            <text:p>じゃんかるゔぁん</text:p>
          </table:table-cell>
          <table:table-cell table:style-name="ce11" office:value-type="string" calcext:value-type="string">
            <text:p>第５弾ブースターパック</text:p>
          </table:table-cell>
          <table:table-cell table:style-name="ce11" table:formula="of:=VLOOKUP([.H412];[$収録番号.$A$1:$収録番号.$B$10];2;0)" office:value-type="float" office:value="55" calcext:value-type="float">
            <text:p>55</text:p>
          </table:table-cell>
          <table:table-cell office:value-type="string" calcext:value-type="string">
            <text:p>N</text:p>
          </table:table-cell>
          <table:table-cell table:style-name="ce11" table:formula="of:=VLOOKUP([.J412];[$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12];[$種類番号.$A$1:$種類番号.$B$4];2;0)" office:value-type="float" office:value="1" calcext:value-type="float">
            <text:p>1</text:p>
          </table:table-cell>
          <table:table-cell office:value-type="string" calcext:value-type="string">
            <text:p>青</text:p>
          </table:table-cell>
          <table:table-cell table:style-name="ce11" table:formula="of:=VLOOKUP([.N412];[$色番号.$A$1:$色番号.$B$10];2;0)" office:value-type="float" office:value="2" calcext:value-type="float">
            <text:p>2</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1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12];[$特性番号.$A$1:$特性番号.$B$8];2;0);0)" office:value-type="float" office:value="0" calcext:value-type="float">
            <text:p>0</text:p>
          </table:table-cell>
          <table:table-cell office:value-type="string" calcext:value-type="string">
            <text:p>この能力は戦場で発動する。自分か相手のメインフェイズが開始したとき、自分の魔力ゾーンのマリョク1つを裏にして発動できる。相手はこのターンに限り「自分の「執筆」は発動しない」を得る。¶この能力は、相手のターンに戦場で効果を発揮する。これは「パワー+2000」を得る。</text:p>
          </table:table-cell>
          <table:table-cell office:value-type="float" office:value="1000" calcext:value-type="float">
            <text:p>1000</text:p>
          </table:table-cell>
          <table:table-cell office:value-type="string" calcext:value-type="string">
            <text:p>1ドローする</text:p>
          </table:table-cell>
          <table:table-cell table:style-name="ce11" table:formula="of:=IFERROR(VLOOKUP([.$X412];[$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21.png</text:p>
          </table:table-cell>
          <table:table-cell table:style-name="ce11" table:formula="of:=CONCATENATE([$JSON.$A$1];[.$C412];[$JSON.$B$1];[.$E412];[$JSON.$C$1];[.F412];[$JSON.$D$1];[.$G412];[$JSON.$E$1];IF(ISNA([.$T412]);&quot;null&quot;;&quot;&quot;&quot;&quot;&amp;[.$T412]&amp;&quot;&quot;&quot;&quot;);[$JSON.$F$1];[.$V412];[$JSON.$G$1];IF(ISNA([.$X412]);&quot;null&quot;;&quot;&quot;&quot;&quot;&amp;[.$X412]&amp;&quot;&quot;&quot;&quot;);[$JSON.$H$1];[.$AA412];[$JSON.$I$1];[.$I412];[$JSON.$J$1];[.K412];[$JSON.$K$1];[.$M412];[$JSON.$L$1];[.$P412];[$JSON.$M$1];[.$O412];[$JSON.$N$1];[.$S412];[$JSON.$O$1];[.$U412];[$JSON.$P$1];IF(ISNA([.$W412]);&quot;null&quot;;[.$W412]);[$JSON.$Q$1];[.$Y412];[$JSON.$R$1];IF([.$Z412];&quot;true&quot;;&quot;false&quot;);[$JSON.$S$1];[.$A412];[$JSON.$T$1];[.$B412];[$JSON.$U$1])" office:value-type="string" office:string-value="{&quot;id&quot;:&quot;2nd1-21&quot;,&quot;name&quot;:&quot;ジャン・カルヴァン&quot;,&quot;displayName&quot;:&quot;ジャン・カルヴァン (第5弾)&quot;,&quot;kana&quot;:&quot;じゃんかるゔぁん&quot;,&quot;traitText&quot;:null,&quot;ruleText&quot;:&quot;この能力は戦場で発動する。自分か相手のメインフェイズが開始したとき、自分の魔力ゾーンのマリョク1つを裏にして発動できる。相手はこのターンに限り「自分の「執筆」は発動しない」を得る。¶この能力は、相手のターンに戦場で効果を発揮する。これは「パワー+2000」を得る。&quot;,&quot;legacyText&quot;:&quot;1ドローする&quot;,&quot;imageUrl&quot;:&quot;https://one-draw.jp/ijinden/cardlist/005/card/05_021.png&quot;,&quot;expansion&quot;:55,&quot;rarity&quot;:1,&quot;type&quot;:1,&quot;level&quot;:2,&quot;color&quot;:2,&quot;term&quot;:0,&quot;trait&quot;:0,&quot;power&quot;:1000,&quot;legacy&quot;:4,&quot;anyNumCopies&quot;:false,&quot;orderTable&quot;:411,&quot;orderDeck&quot;:53}," calcext:value-type="string">
            <text:p>{"id":"2nd1-21","name":"ジャン・カルヴァン","displayName":"ジャン・カルヴァン (第5弾)","kana":"じゃんかるゔぁん","traitText":null,"ruleText":"この能力は戦場で発動する。自分か相手のメインフェイズが開始したとき、自分の魔力ゾーンのマリョク1つを裏にして発動できる。相手はこのターンに限り「自分の「執筆」は発動しない」を得る。¶この能力は、相手のターンに戦場で効果を発揮する。これは「パワー+2000」を得る。","legacyText":"1ドローする","imageUrl":"https://one-draw.jp/ijinden/cardlist/005/card/05_021.png","expansion":55,"rarity":1,"type":1,"level":2,"color":2,"term":0,"trait":0,"power":1000,"legacy":4,"anyNumCopies":false,"orderTable":411,"orderDeck":53},</text:p>
          </table:table-cell>
          <table:table-cell table:number-columns-repeated="16356"/>
        </table:table-row>
        <table:table-row table:style-name="ro2">
          <table:table-cell table:style-name="ce11" office:value-type="float" office:value="412" calcext:value-type="float">
            <text:p>412</text:p>
          </table:table-cell>
          <table:table-cell table:style-name="ce11" office:value-type="float" office:value="13" calcext:value-type="float">
            <text:p>13</text:p>
          </table:table-cell>
          <table:table-cell table:formula="of:=CONCATENATE(&quot;2nd1-&quot;;TEXT([.D413];&quot;0&quot;))" office:value-type="string" office:string-value="2nd1-22" calcext:value-type="string">
            <text:p>2nd1-22</text:p>
          </table:table-cell>
          <table:table-cell office:value-type="float" office:value="22" calcext:value-type="float">
            <text:p>22</text:p>
          </table:table-cell>
          <table:table-cell office:value-type="string" calcext:value-type="string">
            <text:p>フランソワ1世</text:p>
          </table:table-cell>
          <table:table-cell table:style-name="ce11" table:formula="of:=[.E413]" office:value-type="string" office:string-value="フランソワ1世" calcext:value-type="string">
            <text:p>フランソワ1世</text:p>
          </table:table-cell>
          <table:table-cell office:value-type="string" calcext:value-type="string">
            <text:p>ふらんそわいっせい</text:p>
          </table:table-cell>
          <table:table-cell table:style-name="ce11" office:value-type="string" calcext:value-type="string">
            <text:p>第５弾ブースターパック</text:p>
          </table:table-cell>
          <table:table-cell table:style-name="ce11" table:formula="of:=VLOOKUP([.H413];[$収録番号.$A$1:$収録番号.$B$10];2;0)" office:value-type="float" office:value="55" calcext:value-type="float">
            <text:p>55</text:p>
          </table:table-cell>
          <table:table-cell office:value-type="string" calcext:value-type="string">
            <text:p>N</text:p>
          </table:table-cell>
          <table:table-cell table:style-name="ce11" table:formula="of:=VLOOKUP([.J413];[$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13];[$種類番号.$A$1:$種類番号.$B$4];2;0)" office:value-type="float" office:value="1" calcext:value-type="float">
            <text:p>1</text:p>
          </table:table-cell>
          <table:table-cell office:value-type="string" calcext:value-type="string">
            <text:p>青</text:p>
          </table:table-cell>
          <table:table-cell table:style-name="ce11" table:formula="of:=VLOOKUP([.N413];[$色番号.$A$1:$色番号.$B$10];2;0)" office:value-type="float" office:value="2" calcext:value-type="float">
            <text:p>2</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1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13];[$特性番号.$A$1:$特性番号.$B$8];2;0);0)" office:value-type="float" office:value="0" calcext:value-type="float">
            <text:p>0</text:p>
          </table:table-cell>
          <table:table-cell office:value-type="string" calcext:value-type="string">
            <text:p>この能力は戦場で効果を発揮する。自分の戦場の「航海」を持つイジンは「即応」を得る。</text:p>
          </table:table-cell>
          <table:table-cell office:value-type="float" office:value="500" calcext:value-type="float">
            <text:p>500</text:p>
          </table:table-cell>
          <table:table-cell office:value-type="string" calcext:value-type="string">
            <text:p>1ドローする</text:p>
          </table:table-cell>
          <table:table-cell table:style-name="ce11" table:formula="of:=IFERROR(VLOOKUP([.$X413];[$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22.png</text:p>
          </table:table-cell>
          <table:table-cell table:style-name="ce11" table:formula="of:=CONCATENATE([$JSON.$A$1];[.$C413];[$JSON.$B$1];[.$E413];[$JSON.$C$1];[.F413];[$JSON.$D$1];[.$G413];[$JSON.$E$1];IF(ISNA([.$T413]);&quot;null&quot;;&quot;&quot;&quot;&quot;&amp;[.$T413]&amp;&quot;&quot;&quot;&quot;);[$JSON.$F$1];[.$V413];[$JSON.$G$1];IF(ISNA([.$X413]);&quot;null&quot;;&quot;&quot;&quot;&quot;&amp;[.$X413]&amp;&quot;&quot;&quot;&quot;);[$JSON.$H$1];[.$AA413];[$JSON.$I$1];[.$I413];[$JSON.$J$1];[.K413];[$JSON.$K$1];[.$M413];[$JSON.$L$1];[.$P413];[$JSON.$M$1];[.$O413];[$JSON.$N$1];[.$S413];[$JSON.$O$1];[.$U413];[$JSON.$P$1];IF(ISNA([.$W413]);&quot;null&quot;;[.$W413]);[$JSON.$Q$1];[.$Y413];[$JSON.$R$1];IF([.$Z413];&quot;true&quot;;&quot;false&quot;);[$JSON.$S$1];[.$A413];[$JSON.$T$1];[.$B413];[$JSON.$U$1])" office:value-type="string" office:string-value="{&quot;id&quot;:&quot;2nd1-22&quot;,&quot;name&quot;:&quot;フランソワ1世&quot;,&quot;displayName&quot;:&quot;フランソワ1世&quot;,&quot;kana&quot;:&quot;ふらんそわいっせい&quot;,&quot;traitText&quot;:null,&quot;ruleText&quot;:&quot;この能力は戦場で効果を発揮する。自分の戦場の「航海」を持つイジンは「即応」を得る。&quot;,&quot;legacyText&quot;:&quot;1ドローする&quot;,&quot;imageUrl&quot;:&quot;https://one-draw.jp/ijinden/cardlist/005/card/05_022.png&quot;,&quot;expansion&quot;:55,&quot;rarity&quot;:1,&quot;type&quot;:1,&quot;level&quot;:1,&quot;color&quot;:2,&quot;term&quot;:0,&quot;trait&quot;:0,&quot;power&quot;:500,&quot;legacy&quot;:4,&quot;anyNumCopies&quot;:false,&quot;orderTable&quot;:412,&quot;orderDeck&quot;:13}," calcext:value-type="string">
            <text:p>{"id":"2nd1-22","name":"フランソワ1世","displayName":"フランソワ1世","kana":"ふらんそわいっせい","traitText":null,"ruleText":"この能力は戦場で効果を発揮する。自分の戦場の「航海」を持つイジンは「即応」を得る。","legacyText":"1ドローする","imageUrl":"https://one-draw.jp/ijinden/cardlist/005/card/05_022.png","expansion":55,"rarity":1,"type":1,"level":1,"color":2,"term":0,"trait":0,"power":500,"legacy":4,"anyNumCopies":false,"orderTable":412,"orderDeck":13},</text:p>
          </table:table-cell>
          <table:table-cell table:number-columns-repeated="16356"/>
        </table:table-row>
        <table:table-row table:style-name="ro2">
          <table:table-cell table:style-name="ce11" office:value-type="float" office:value="413" calcext:value-type="float">
            <text:p>413</text:p>
          </table:table-cell>
          <table:table-cell table:style-name="ce11" office:value-type="float" office:value="54" calcext:value-type="float">
            <text:p>54</text:p>
          </table:table-cell>
          <table:table-cell table:formula="of:=CONCATENATE(&quot;2nd1-&quot;;TEXT([.D414];&quot;0&quot;))" office:value-type="string" office:string-value="2nd1-23" calcext:value-type="string">
            <text:p>2nd1-23</text:p>
          </table:table-cell>
          <table:table-cell office:value-type="float" office:value="23" calcext:value-type="float">
            <text:p>23</text:p>
          </table:table-cell>
          <table:table-cell office:value-type="string" calcext:value-type="string">
            <text:p>ジャック・カルティエ</text:p>
          </table:table-cell>
          <table:table-cell table:style-name="ce11" table:formula="of:=[.E414]" office:value-type="string" office:string-value="ジャック・カルティエ" calcext:value-type="string">
            <text:p>ジャック・カルティエ</text:p>
          </table:table-cell>
          <table:table-cell office:value-type="string" calcext:value-type="string">
            <text:p>じゃっくかるてぃえ</text:p>
          </table:table-cell>
          <table:table-cell table:style-name="ce11" office:value-type="string" calcext:value-type="string">
            <text:p>第５弾ブースターパック</text:p>
          </table:table-cell>
          <table:table-cell table:style-name="ce11" table:formula="of:=VLOOKUP([.H414];[$収録番号.$A$1:$収録番号.$B$10];2;0)" office:value-type="float" office:value="55" calcext:value-type="float">
            <text:p>55</text:p>
          </table:table-cell>
          <table:table-cell office:value-type="string" calcext:value-type="string">
            <text:p>N</text:p>
          </table:table-cell>
          <table:table-cell table:style-name="ce11" table:formula="of:=VLOOKUP([.J414];[$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14];[$種類番号.$A$1:$種類番号.$B$4];2;0)" office:value-type="float" office:value="1" calcext:value-type="float">
            <text:p>1</text:p>
          </table:table-cell>
          <table:table-cell office:value-type="string" calcext:value-type="string">
            <text:p>青</text:p>
          </table:table-cell>
          <table:table-cell table:style-name="ce11" table:formula="of:=VLOOKUP([.N414];[$色番号.$A$1:$色番号.$B$10];2;0)" office:value-type="float" office:value="2" calcext:value-type="float">
            <text:p>2</text:p>
          </table:table-cell>
          <table:table-cell office:value-type="float" office:value="2" calcext:value-type="float">
            <text:p>2</text:p>
          </table:table-cell>
          <table:table-cell table:style-name="ce11" table:formula="of:=NA()" office:value-type="string" office:string-value="" calcext:value-type="error">
            <text:p>#N/A</text:p>
          </table:table-cell>
          <table:table-cell office:value-type="string" calcext:value-type="string">
            <text:p>航海</text:p>
          </table:table-cell>
          <table:table-cell table:style-name="ce11" table:formula="of:=IFERROR(VLOOKUP([.$R414];[$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414];[$特性番号.$A$1:$特性番号.$B$8];2;0);0)" office:value-type="float" office:value="0" calcext:value-type="float">
            <text:p>0</text:p>
          </table:table-cell>
          <table:table-cell office:value-type="string" calcext:value-type="string">
            <text:p>航海 - この能力は、これがアタッカーになったときに発動する。自分の魔力ゾーンの裏のカード1つを裏のまま戦場に置く。</text:p>
          </table:table-cell>
          <table:table-cell office:value-type="float" office:value="1000" calcext:value-type="float">
            <text:p>1000</text:p>
          </table:table-cell>
          <table:table-cell office:value-type="string" calcext:value-type="string">
            <text:p>1ドローする</text:p>
          </table:table-cell>
          <table:table-cell table:style-name="ce11" table:formula="of:=IFERROR(VLOOKUP([.$X414];[$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23.png</text:p>
          </table:table-cell>
          <table:table-cell table:style-name="ce11" table:formula="of:=CONCATENATE([$JSON.$A$1];[.$C414];[$JSON.$B$1];[.$E414];[$JSON.$C$1];[.F414];[$JSON.$D$1];[.$G414];[$JSON.$E$1];IF(ISNA([.$T414]);&quot;null&quot;;&quot;&quot;&quot;&quot;&amp;[.$T414]&amp;&quot;&quot;&quot;&quot;);[$JSON.$F$1];[.$V414];[$JSON.$G$1];IF(ISNA([.$X414]);&quot;null&quot;;&quot;&quot;&quot;&quot;&amp;[.$X414]&amp;&quot;&quot;&quot;&quot;);[$JSON.$H$1];[.$AA414];[$JSON.$I$1];[.$I414];[$JSON.$J$1];[.K414];[$JSON.$K$1];[.$M414];[$JSON.$L$1];[.$P414];[$JSON.$M$1];[.$O414];[$JSON.$N$1];[.$S414];[$JSON.$O$1];[.$U414];[$JSON.$P$1];IF(ISNA([.$W414]);&quot;null&quot;;[.$W414]);[$JSON.$Q$1];[.$Y414];[$JSON.$R$1];IF([.$Z414];&quot;true&quot;;&quot;false&quot;);[$JSON.$S$1];[.$A414];[$JSON.$T$1];[.$B414];[$JSON.$U$1])" office:value-type="string" office:string-value="{&quot;id&quot;:&quot;2nd1-23&quot;,&quot;name&quot;:&quot;ジャック・カルティエ&quot;,&quot;displayName&quot;:&quot;ジャック・カルティエ&quot;,&quot;kana&quot;:&quot;じゃっくかるてぃえ&quot;,&quot;traitText&quot;:null,&quot;ruleText&quot;:&quot;航海 - この能力は、これがアタッカーになったときに発動する。自分の魔力ゾーンの裏のカード1つを裏のまま戦場に置く。&quot;,&quot;legacyText&quot;:&quot;1ドローする&quot;,&quot;imageUrl&quot;:&quot;https://one-draw.jp/ijinden/cardlist/005/card/05_023.png&quot;,&quot;expansion&quot;:55,&quot;rarity&quot;:1,&quot;type&quot;:1,&quot;level&quot;:2,&quot;color&quot;:2,&quot;term&quot;:1,&quot;trait&quot;:0,&quot;power&quot;:1000,&quot;legacy&quot;:4,&quot;anyNumCopies&quot;:false,&quot;orderTable&quot;:413,&quot;orderDeck&quot;:54}," calcext:value-type="string">
            <text:p>{"id":"2nd1-23","name":"ジャック・カルティエ","displayName":"ジャック・カルティエ","kana":"じゃっくかるてぃえ","traitText":null,"ruleText":"航海 - この能力は、これがアタッカーになったときに発動する。自分の魔力ゾーンの裏のカード1つを裏のまま戦場に置く。","legacyText":"1ドローする","imageUrl":"https://one-draw.jp/ijinden/cardlist/005/card/05_023.png","expansion":55,"rarity":1,"type":1,"level":2,"color":2,"term":1,"trait":0,"power":1000,"legacy":4,"anyNumCopies":false,"orderTable":413,"orderDeck":54},</text:p>
          </table:table-cell>
          <table:table-cell table:number-columns-repeated="16356"/>
        </table:table-row>
        <table:table-row table:style-name="ro2">
          <table:table-cell table:style-name="ce11" office:value-type="float" office:value="414" calcext:value-type="float">
            <text:p>414</text:p>
          </table:table-cell>
          <table:table-cell table:style-name="ce11" office:value-type="float" office:value="204" calcext:value-type="float">
            <text:p>204</text:p>
          </table:table-cell>
          <table:table-cell table:formula="of:=CONCATENATE(&quot;2nd1-&quot;;TEXT([.D415];&quot;0&quot;))" office:value-type="string" office:string-value="2nd1-24" calcext:value-type="string">
            <text:p>2nd1-24</text:p>
          </table:table-cell>
          <table:table-cell office:value-type="float" office:value="24" calcext:value-type="float">
            <text:p>24</text:p>
          </table:table-cell>
          <table:table-cell office:value-type="string" calcext:value-type="string">
            <text:p>フアン・セバスティアン・エルカーノ</text:p>
          </table:table-cell>
          <table:table-cell table:style-name="ce11" table:formula="of:=[.E415]" office:value-type="string" office:string-value="フアン・セバスティアン・エルカーノ" calcext:value-type="string">
            <text:p>フアン・セバスティアン・エルカーノ</text:p>
          </table:table-cell>
          <table:table-cell office:value-type="string" calcext:value-type="string">
            <text:p>ふあんせばすてぃあんえるかーの</text:p>
          </table:table-cell>
          <table:table-cell table:style-name="ce11" office:value-type="string" calcext:value-type="string">
            <text:p>第５弾ブースターパック</text:p>
          </table:table-cell>
          <table:table-cell table:style-name="ce11" table:formula="of:=VLOOKUP([.H415];[$収録番号.$A$1:$収録番号.$B$10];2;0)" office:value-type="float" office:value="55" calcext:value-type="float">
            <text:p>55</text:p>
          </table:table-cell>
          <table:table-cell office:value-type="string" calcext:value-type="string">
            <text:p>N</text:p>
          </table:table-cell>
          <table:table-cell table:style-name="ce11" table:formula="of:=VLOOKUP([.J415];[$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15];[$種類番号.$A$1:$種類番号.$B$4];2;0)" office:value-type="float" office:value="1" calcext:value-type="float">
            <text:p>1</text:p>
          </table:table-cell>
          <table:table-cell office:value-type="string" calcext:value-type="string">
            <text:p>青</text:p>
          </table:table-cell>
          <table:table-cell table:style-name="ce11" table:formula="of:=VLOOKUP([.N415];[$色番号.$A$1:$色番号.$B$10];2;0)" office:value-type="float" office:value="2" calcext:value-type="float">
            <text:p>2</text:p>
          </table:table-cell>
          <table:table-cell office:value-type="float" office:value="5" calcext:value-type="float">
            <text:p>5</text:p>
          </table:table-cell>
          <table:table-cell table:style-name="ce11" table:formula="of:=NA()" office:value-type="string" office:string-value="" calcext:value-type="error">
            <text:p>#N/A</text:p>
          </table:table-cell>
          <table:table-cell office:value-type="string" calcext:value-type="string">
            <text:p>航海</text:p>
          </table:table-cell>
          <table:table-cell table:style-name="ce11" table:formula="of:=IFERROR(VLOOKUP([.$R415];[$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415];[$特性番号.$A$1:$特性番号.$B$8];2;0);0)" office:value-type="float" office:value="0" calcext:value-type="float">
            <text:p>0</text:p>
          </table:table-cell>
          <table:table-cell office:value-type="string" calcext:value-type="string">
            <text:p>航海 - この能力は、これがアタッカーになったときに発動する。相手の戦場のイジン1体を寝かせる。¶ダブルプレッシャー</text:p>
          </table:table-cell>
          <table:table-cell office:value-type="float" office:value="2000" calcext:value-type="float">
            <text:p>2000</text:p>
          </table:table-cell>
          <table:table-cell office:value-type="string" calcext:value-type="string">
            <text:p>1ドローする</text:p>
          </table:table-cell>
          <table:table-cell table:style-name="ce11" table:formula="of:=IFERROR(VLOOKUP([.$X415];[$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24.png</text:p>
          </table:table-cell>
          <table:table-cell table:style-name="ce11" table:formula="of:=CONCATENATE([$JSON.$A$1];[.$C415];[$JSON.$B$1];[.$E415];[$JSON.$C$1];[.F415];[$JSON.$D$1];[.$G415];[$JSON.$E$1];IF(ISNA([.$T415]);&quot;null&quot;;&quot;&quot;&quot;&quot;&amp;[.$T415]&amp;&quot;&quot;&quot;&quot;);[$JSON.$F$1];[.$V415];[$JSON.$G$1];IF(ISNA([.$X415]);&quot;null&quot;;&quot;&quot;&quot;&quot;&amp;[.$X415]&amp;&quot;&quot;&quot;&quot;);[$JSON.$H$1];[.$AA415];[$JSON.$I$1];[.$I415];[$JSON.$J$1];[.K415];[$JSON.$K$1];[.$M415];[$JSON.$L$1];[.$P415];[$JSON.$M$1];[.$O415];[$JSON.$N$1];[.$S415];[$JSON.$O$1];[.$U415];[$JSON.$P$1];IF(ISNA([.$W415]);&quot;null&quot;;[.$W415]);[$JSON.$Q$1];[.$Y415];[$JSON.$R$1];IF([.$Z415];&quot;true&quot;;&quot;false&quot;);[$JSON.$S$1];[.$A415];[$JSON.$T$1];[.$B415];[$JSON.$U$1])" office:value-type="string" office:string-value="{&quot;id&quot;:&quot;2nd1-24&quot;,&quot;name&quot;:&quot;フアン・セバスティアン・エルカーノ&quot;,&quot;displayName&quot;:&quot;フアン・セバスティアン・エルカーノ&quot;,&quot;kana&quot;:&quot;ふあんせばすてぃあんえるかーの&quot;,&quot;traitText&quot;:null,&quot;ruleText&quot;:&quot;航海 - この能力は、これがアタッカーになったときに発動する。相手の戦場のイジン1体を寝かせる。¶ダブルプレッシャー&quot;,&quot;legacyText&quot;:&quot;1ドローする&quot;,&quot;imageUrl&quot;:&quot;https://one-draw.jp/ijinden/cardlist/005/card/05_024.png&quot;,&quot;expansion&quot;:55,&quot;rarity&quot;:1,&quot;type&quot;:1,&quot;level&quot;:5,&quot;color&quot;:2,&quot;term&quot;:1,&quot;trait&quot;:0,&quot;power&quot;:2000,&quot;legacy&quot;:4,&quot;anyNumCopies&quot;:false,&quot;orderTable&quot;:414,&quot;orderDeck&quot;:204}," calcext:value-type="string">
            <text:p>{"id":"2nd1-24","name":"フアン・セバスティアン・エルカーノ","displayName":"フアン・セバスティアン・エルカーノ","kana":"ふあんせばすてぃあんえるかーの","traitText":null,"ruleText":"航海 - この能力は、これがアタッカーになったときに発動する。相手の戦場のイジン1体を寝かせる。¶ダブルプレッシャー","legacyText":"1ドローする","imageUrl":"https://one-draw.jp/ijinden/cardlist/005/card/05_024.png","expansion":55,"rarity":1,"type":1,"level":5,"color":2,"term":1,"trait":0,"power":2000,"legacy":4,"anyNumCopies":false,"orderTable":414,"orderDeck":204},</text:p>
          </table:table-cell>
          <table:table-cell table:number-columns-repeated="16356"/>
        </table:table-row>
        <table:table-row table:style-name="ro2">
          <table:table-cell table:style-name="ce11" office:value-type="float" office:value="415" calcext:value-type="float">
            <text:p>415</text:p>
          </table:table-cell>
          <table:table-cell table:style-name="ce11" office:value-type="float" office:value="105" calcext:value-type="float">
            <text:p>105</text:p>
          </table:table-cell>
          <table:table-cell table:formula="of:=CONCATENATE(&quot;2nd1-&quot;;TEXT([.D416];&quot;0&quot;))" office:value-type="string" office:string-value="2nd1-25" calcext:value-type="string">
            <text:p>2nd1-25</text:p>
          </table:table-cell>
          <table:table-cell office:value-type="float" office:value="25" calcext:value-type="float">
            <text:p>25</text:p>
          </table:table-cell>
          <table:table-cell office:value-type="string" calcext:value-type="string">
            <text:p>片倉景綱</text:p>
          </table:table-cell>
          <table:table-cell table:style-name="ce11" table:formula="of:=[.E416]" office:value-type="string" office:string-value="片倉景綱" calcext:value-type="string">
            <text:p>片倉景綱</text:p>
          </table:table-cell>
          <table:table-cell office:value-type="string" calcext:value-type="string">
            <text:p>かたくらかげつな</text:p>
          </table:table-cell>
          <table:table-cell table:style-name="ce11" office:value-type="string" calcext:value-type="string">
            <text:p>第５弾ブースターパック</text:p>
          </table:table-cell>
          <table:table-cell table:style-name="ce11" table:formula="of:=VLOOKUP([.H416];[$収録番号.$A$1:$収録番号.$B$10];2;0)" office:value-type="float" office:value="55" calcext:value-type="float">
            <text:p>55</text:p>
          </table:table-cell>
          <table:table-cell office:value-type="string" calcext:value-type="string">
            <text:p>R</text:p>
          </table:table-cell>
          <table:table-cell table:style-name="ce11" table:formula="of:=VLOOKUP([.J416];[$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16];[$種類番号.$A$1:$種類番号.$B$4];2;0)" office:value-type="float" office:value="1" calcext:value-type="float">
            <text:p>1</text:p>
          </table:table-cell>
          <table:table-cell office:value-type="string" calcext:value-type="string">
            <text:p>青</text:p>
          </table:table-cell>
          <table:table-cell table:style-name="ce11" table:formula="of:=VLOOKUP([.N416];[$色番号.$A$1:$色番号.$B$10];2;0)" office:value-type="float" office:value="2" calcext:value-type="float">
            <text:p>2</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16];[$能力語番号.$A$1:$能力語番号.$B$11];2;0);0)" office:value-type="float" office:value="0" calcext:value-type="float">
            <text:p>0</text:p>
          </table:table-cell>
          <table:table-cell office:value-type="string" calcext:value-type="string">
            <text:p>剣術</text:p>
          </table:table-cell>
          <table:table-cell table:style-name="ce11" table:formula="of:=IFERROR(VLOOKUP([.$T416];[$特性番号.$A$1:$特性番号.$B$8];2;0);0)" office:value-type="float" office:value="1" calcext:value-type="float">
            <text:p>1</text:p>
          </table:table-cell>
          <table:table-cell office:value-type="string" calcext:value-type="string">
            <text:p>この能力は、自分の戦場の青のイジンがアタッカーになったときに戦場で発動する。そのイジンのパワーより低いパワーを持つ、相手の戦場のイジンすべてを寝かせる。</text:p>
          </table:table-cell>
          <table:table-cell office:value-type="float" office:value="3000" calcext:value-type="float">
            <text:p>3000</text:p>
          </table:table-cell>
          <table:table-cell office:value-type="string" calcext:value-type="string">
            <text:p>1ドローする</text:p>
          </table:table-cell>
          <table:table-cell table:style-name="ce11" table:formula="of:=IFERROR(VLOOKUP([.$X416];[$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25.png</text:p>
          </table:table-cell>
          <table:table-cell table:style-name="ce11" table:formula="of:=CONCATENATE([$JSON.$A$1];[.$C416];[$JSON.$B$1];[.$E416];[$JSON.$C$1];[.F416];[$JSON.$D$1];[.$G416];[$JSON.$E$1];IF(ISNA([.$T416]);&quot;null&quot;;&quot;&quot;&quot;&quot;&amp;[.$T416]&amp;&quot;&quot;&quot;&quot;);[$JSON.$F$1];[.$V416];[$JSON.$G$1];IF(ISNA([.$X416]);&quot;null&quot;;&quot;&quot;&quot;&quot;&amp;[.$X416]&amp;&quot;&quot;&quot;&quot;);[$JSON.$H$1];[.$AA416];[$JSON.$I$1];[.$I416];[$JSON.$J$1];[.K416];[$JSON.$K$1];[.$M416];[$JSON.$L$1];[.$P416];[$JSON.$M$1];[.$O416];[$JSON.$N$1];[.$S416];[$JSON.$O$1];[.$U416];[$JSON.$P$1];IF(ISNA([.$W416]);&quot;null&quot;;[.$W416]);[$JSON.$Q$1];[.$Y416];[$JSON.$R$1];IF([.$Z416];&quot;true&quot;;&quot;false&quot;);[$JSON.$S$1];[.$A416];[$JSON.$T$1];[.$B416];[$JSON.$U$1])" office:value-type="string" office:string-value="{&quot;id&quot;:&quot;2nd1-25&quot;,&quot;name&quot;:&quot;片倉景綱&quot;,&quot;displayName&quot;:&quot;片倉景綱&quot;,&quot;kana&quot;:&quot;かたくらかげつな&quot;,&quot;traitText&quot;:&quot;剣術&quot;,&quot;ruleText&quot;:&quot;この能力は、自分の戦場の青のイジンがアタッカーになったときに戦場で発動する。そのイジンのパワーより低いパワーを持つ、相手の戦場のイジンすべてを寝かせる。&quot;,&quot;legacyText&quot;:&quot;1ドローする&quot;,&quot;imageUrl&quot;:&quot;https://one-draw.jp/ijinden/cardlist/005/card/05_025.png&quot;,&quot;expansion&quot;:55,&quot;rarity&quot;:2,&quot;type&quot;:1,&quot;level&quot;:3,&quot;color&quot;:2,&quot;term&quot;:0,&quot;trait&quot;:1,&quot;power&quot;:3000,&quot;legacy&quot;:4,&quot;anyNumCopies&quot;:false,&quot;orderTable&quot;:415,&quot;orderDeck&quot;:105}," calcext:value-type="string">
            <text:p>{"id":"2nd1-25","name":"片倉景綱","displayName":"片倉景綱","kana":"かたくらかげつな","traitText":"剣術","ruleText":"この能力は、自分の戦場の青のイジンがアタッカーになったときに戦場で発動する。そのイジンのパワーより低いパワーを持つ、相手の戦場のイジンすべてを寝かせる。","legacyText":"1ドローする","imageUrl":"https://one-draw.jp/ijinden/cardlist/005/card/05_025.png","expansion":55,"rarity":2,"type":1,"level":3,"color":2,"term":0,"trait":1,"power":3000,"legacy":4,"anyNumCopies":false,"orderTable":415,"orderDeck":105},</text:p>
          </table:table-cell>
          <table:table-cell table:number-columns-repeated="16356"/>
        </table:table-row>
        <table:table-row table:style-name="ro2">
          <table:table-cell table:style-name="ce11" office:value-type="float" office:value="416" calcext:value-type="float">
            <text:p>416</text:p>
          </table:table-cell>
          <table:table-cell table:style-name="ce11" office:value-type="float" office:value="14" calcext:value-type="float">
            <text:p>14</text:p>
          </table:table-cell>
          <table:table-cell table:formula="of:=CONCATENATE(&quot;2nd1-&quot;;TEXT([.D417];&quot;0&quot;))" office:value-type="string" office:string-value="2nd1-26" calcext:value-type="string">
            <text:p>2nd1-26</text:p>
          </table:table-cell>
          <table:table-cell office:value-type="float" office:value="26" calcext:value-type="float">
            <text:p>26</text:p>
          </table:table-cell>
          <table:table-cell office:value-type="string" calcext:value-type="string">
            <text:p>デジデリウス・エラスムス</text:p>
          </table:table-cell>
          <table:table-cell table:style-name="ce11" table:formula="of:=[.E417]" office:value-type="string" office:string-value="デジデリウス・エラスムス" calcext:value-type="string">
            <text:p>デジデリウス・エラスムス</text:p>
          </table:table-cell>
          <table:table-cell office:value-type="string" calcext:value-type="string">
            <text:p>でじでりうすえらすむす</text:p>
          </table:table-cell>
          <table:table-cell table:style-name="ce11" office:value-type="string" calcext:value-type="string">
            <text:p>第５弾ブースターパック</text:p>
          </table:table-cell>
          <table:table-cell table:style-name="ce11" table:formula="of:=VLOOKUP([.H417];[$収録番号.$A$1:$収録番号.$B$10];2;0)" office:value-type="float" office:value="55" calcext:value-type="float">
            <text:p>55</text:p>
          </table:table-cell>
          <table:table-cell office:value-type="string" calcext:value-type="string">
            <text:p>R</text:p>
          </table:table-cell>
          <table:table-cell table:style-name="ce11" table:formula="of:=VLOOKUP([.J417];[$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17];[$種類番号.$A$1:$種類番号.$B$4];2;0)" office:value-type="float" office:value="1" calcext:value-type="float">
            <text:p>1</text:p>
          </table:table-cell>
          <table:table-cell office:value-type="string" calcext:value-type="string">
            <text:p>青</text:p>
          </table:table-cell>
          <table:table-cell table:style-name="ce11" table:formula="of:=VLOOKUP([.N417];[$色番号.$A$1:$色番号.$B$10];2;0)" office:value-type="float" office:value="2" calcext:value-type="float">
            <text:p>2</text:p>
          </table:table-cell>
          <table:table-cell office:value-type="float" office:value="1" calcext:value-type="float">
            <text:p>1</text:p>
          </table:table-cell>
          <table:table-cell table:style-name="ce11" table:formula="of:=NA()" office:value-type="string" office:string-value="" calcext:value-type="error">
            <text:p>#N/A</text:p>
          </table:table-cell>
          <table:table-cell office:value-type="string" calcext:value-type="string">
            <text:p>執筆</text:p>
          </table:table-cell>
          <table:table-cell table:style-name="ce11" table:formula="of:=IFERROR(VLOOKUP([.$R417];[$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417];[$特性番号.$A$1:$特性番号.$B$8];2;0);0)" office:value-type="float" office:value="0" calcext:value-type="float">
            <text:p>0</text:p>
          </table:table-cell>
          <table:table-cell office:value-type="string" calcext:value-type="string">
            <text:p>執筆 - この能力は、自分か相手の戦場にハイケイが置かれたときに戦場で発動できる。そのハイケイと同じ色を持つ自分か相手の戦場のイジン1体を手札に戻す。</text:p>
          </table:table-cell>
          <table:table-cell office:value-type="float" office:value="500" calcext:value-type="float">
            <text:p>500</text:p>
          </table:table-cell>
          <table:table-cell office:value-type="string" calcext:value-type="string">
            <text:p>1ドローする</text:p>
          </table:table-cell>
          <table:table-cell table:style-name="ce11" table:formula="of:=IFERROR(VLOOKUP([.$X417];[$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26.png</text:p>
          </table:table-cell>
          <table:table-cell table:style-name="ce11" table:formula="of:=CONCATENATE([$JSON.$A$1];[.$C417];[$JSON.$B$1];[.$E417];[$JSON.$C$1];[.F417];[$JSON.$D$1];[.$G417];[$JSON.$E$1];IF(ISNA([.$T417]);&quot;null&quot;;&quot;&quot;&quot;&quot;&amp;[.$T417]&amp;&quot;&quot;&quot;&quot;);[$JSON.$F$1];[.$V417];[$JSON.$G$1];IF(ISNA([.$X417]);&quot;null&quot;;&quot;&quot;&quot;&quot;&amp;[.$X417]&amp;&quot;&quot;&quot;&quot;);[$JSON.$H$1];[.$AA417];[$JSON.$I$1];[.$I417];[$JSON.$J$1];[.K417];[$JSON.$K$1];[.$M417];[$JSON.$L$1];[.$P417];[$JSON.$M$1];[.$O417];[$JSON.$N$1];[.$S417];[$JSON.$O$1];[.$U417];[$JSON.$P$1];IF(ISNA([.$W417]);&quot;null&quot;;[.$W417]);[$JSON.$Q$1];[.$Y417];[$JSON.$R$1];IF([.$Z417];&quot;true&quot;;&quot;false&quot;);[$JSON.$S$1];[.$A417];[$JSON.$T$1];[.$B417];[$JSON.$U$1])" office:value-type="string" office:string-value="{&quot;id&quot;:&quot;2nd1-26&quot;,&quot;name&quot;:&quot;デジデリウス・エラスムス&quot;,&quot;displayName&quot;:&quot;デジデリウス・エラスムス&quot;,&quot;kana&quot;:&quot;でじでりうすえらすむす&quot;,&quot;traitText&quot;:null,&quot;ruleText&quot;:&quot;執筆 - この能力は、自分か相手の戦場にハイケイが置かれたときに戦場で発動できる。そのハイケイと同じ色を持つ自分か相手の戦場のイジン1体を手札に戻す。&quot;,&quot;legacyText&quot;:&quot;1ドローする&quot;,&quot;imageUrl&quot;:&quot;https://one-draw.jp/ijinden/cardlist/005/card/05_026.png&quot;,&quot;expansion&quot;:55,&quot;rarity&quot;:2,&quot;type&quot;:1,&quot;level&quot;:1,&quot;color&quot;:2,&quot;term&quot;:2,&quot;trait&quot;:0,&quot;power&quot;:500,&quot;legacy&quot;:4,&quot;anyNumCopies&quot;:false,&quot;orderTable&quot;:416,&quot;orderDeck&quot;:14}," calcext:value-type="string">
            <text:p>{"id":"2nd1-26","name":"デジデリウス・エラスムス","displayName":"デジデリウス・エラスムス","kana":"でじでりうすえらすむす","traitText":null,"ruleText":"執筆 - この能力は、自分か相手の戦場にハイケイが置かれたときに戦場で発動できる。そのハイケイと同じ色を持つ自分か相手の戦場のイジン1体を手札に戻す。","legacyText":"1ドローする","imageUrl":"https://one-draw.jp/ijinden/cardlist/005/card/05_026.png","expansion":55,"rarity":2,"type":1,"level":1,"color":2,"term":2,"trait":0,"power":500,"legacy":4,"anyNumCopies":false,"orderTable":416,"orderDeck":14},</text:p>
          </table:table-cell>
          <table:table-cell table:number-columns-repeated="16356"/>
        </table:table-row>
        <table:table-row table:style-name="ro2">
          <table:table-cell table:style-name="ce11" office:value-type="float" office:value="417" calcext:value-type="float">
            <text:p>417</text:p>
          </table:table-cell>
          <table:table-cell table:style-name="ce11" office:value-type="float" office:value="280" calcext:value-type="float">
            <text:p>280</text:p>
          </table:table-cell>
          <table:table-cell table:formula="of:=CONCATENATE(&quot;2nd1-&quot;;TEXT([.D418];&quot;0&quot;))" office:value-type="string" office:string-value="2nd1-27" calcext:value-type="string">
            <text:p>2nd1-27</text:p>
          </table:table-cell>
          <table:table-cell office:value-type="float" office:value="27" calcext:value-type="float">
            <text:p>27</text:p>
          </table:table-cell>
          <table:table-cell office:value-type="string" calcext:value-type="string">
            <text:p>アンリ4世</text:p>
          </table:table-cell>
          <table:table-cell table:style-name="ce11" table:formula="of:=[.E418]" office:value-type="string" office:string-value="アンリ4世" calcext:value-type="string">
            <text:p>アンリ4世</text:p>
          </table:table-cell>
          <table:table-cell office:value-type="string" calcext:value-type="string">
            <text:p>あんりよんせい</text:p>
          </table:table-cell>
          <table:table-cell table:style-name="ce11" office:value-type="string" calcext:value-type="string">
            <text:p>第５弾ブースターパック</text:p>
          </table:table-cell>
          <table:table-cell table:style-name="ce11" table:formula="of:=VLOOKUP([.H418];[$収録番号.$A$1:$収録番号.$B$10];2;0)" office:value-type="float" office:value="55" calcext:value-type="float">
            <text:p>55</text:p>
          </table:table-cell>
          <table:table-cell office:value-type="string" calcext:value-type="string">
            <text:p>R</text:p>
          </table:table-cell>
          <table:table-cell table:style-name="ce11" table:formula="of:=VLOOKUP([.J418];[$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18];[$種類番号.$A$1:$種類番号.$B$4];2;0)" office:value-type="float" office:value="1" calcext:value-type="float">
            <text:p>1</text:p>
          </table:table-cell>
          <table:table-cell office:value-type="string" calcext:value-type="string">
            <text:p>青</text:p>
          </table:table-cell>
          <table:table-cell table:style-name="ce11" table:formula="of:=VLOOKUP([.N418];[$色番号.$A$1:$色番号.$B$10];2;0)" office:value-type="float" office:value="2" calcext:value-type="float">
            <text:p>2</text:p>
          </table:table-cell>
          <table:table-cell office:value-type="float" office:value="8" calcext:value-type="float">
            <text:p>8</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1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18];[$特性番号.$A$1:$特性番号.$B$8];2;0);0)" office:value-type="float" office:value="0" calcext:value-type="float">
            <text:p>0</text:p>
          </table:table-cell>
          <table:table-cell office:value-type="string" calcext:value-type="string">
            <text:p>この能力は、これがブロックされたときに発動できる。イジン召喚権+1して、これとこれをブロックしているブロッカーすべてを手札に戻す。¶トリプルプレッシャー</text:p>
          </table:table-cell>
          <table:table-cell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418];[$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27.png</text:p>
          </table:table-cell>
          <table:table-cell table:style-name="ce11" table:formula="of:=CONCATENATE([$JSON.$A$1];[.$C418];[$JSON.$B$1];[.$E418];[$JSON.$C$1];[.F418];[$JSON.$D$1];[.$G418];[$JSON.$E$1];IF(ISNA([.$T418]);&quot;null&quot;;&quot;&quot;&quot;&quot;&amp;[.$T418]&amp;&quot;&quot;&quot;&quot;);[$JSON.$F$1];[.$V418];[$JSON.$G$1];IF(ISNA([.$X418]);&quot;null&quot;;&quot;&quot;&quot;&quot;&amp;[.$X418]&amp;&quot;&quot;&quot;&quot;);[$JSON.$H$1];[.$AA418];[$JSON.$I$1];[.$I418];[$JSON.$J$1];[.K418];[$JSON.$K$1];[.$M418];[$JSON.$L$1];[.$P418];[$JSON.$M$1];[.$O418];[$JSON.$N$1];[.$S418];[$JSON.$O$1];[.$U418];[$JSON.$P$1];IF(ISNA([.$W418]);&quot;null&quot;;[.$W418]);[$JSON.$Q$1];[.$Y418];[$JSON.$R$1];IF([.$Z418];&quot;true&quot;;&quot;false&quot;);[$JSON.$S$1];[.$A418];[$JSON.$T$1];[.$B418];[$JSON.$U$1])" office:value-type="string" office:string-value="{&quot;id&quot;:&quot;2nd1-27&quot;,&quot;name&quot;:&quot;アンリ4世&quot;,&quot;displayName&quot;:&quot;アンリ4世&quot;,&quot;kana&quot;:&quot;あんりよんせい&quot;,&quot;traitText&quot;:null,&quot;ruleText&quot;:&quot;この能力は、これがブロックされたときに発動できる。イジン召喚権+1して、これとこれをブロックしているブロッカーすべてを手札に戻す。¶トリプルプレッシャー&quot;,&quot;legacyText&quot;:null,&quot;imageUrl&quot;:&quot;https://one-draw.jp/ijinden/cardlist/005/card/05_027.png&quot;,&quot;expansion&quot;:55,&quot;rarity&quot;:2,&quot;type&quot;:1,&quot;level&quot;:8,&quot;color&quot;:2,&quot;term&quot;:0,&quot;trait&quot;:0,&quot;power&quot;:7000,&quot;legacy&quot;:0,&quot;anyNumCopies&quot;:false,&quot;orderTable&quot;:417,&quot;orderDeck&quot;:280}," calcext:value-type="string">
            <text:p>{"id":"2nd1-27","name":"アンリ4世","displayName":"アンリ4世","kana":"あんりよんせい","traitText":null,"ruleText":"この能力は、これがブロックされたときに発動できる。イジン召喚権+1して、これとこれをブロックしているブロッカーすべてを手札に戻す。¶トリプルプレッシャー","legacyText":null,"imageUrl":"https://one-draw.jp/ijinden/cardlist/005/card/05_027.png","expansion":55,"rarity":2,"type":1,"level":8,"color":2,"term":0,"trait":0,"power":7000,"legacy":0,"anyNumCopies":false,"orderTable":417,"orderDeck":280},</text:p>
          </table:table-cell>
          <table:table-cell table:number-columns-repeated="16356"/>
        </table:table-row>
        <table:table-row table:style-name="ro2">
          <table:table-cell table:style-name="ce11" office:value-type="float" office:value="418" calcext:value-type="float">
            <text:p>418</text:p>
          </table:table-cell>
          <table:table-cell table:style-name="ce11" office:value-type="float" office:value="154" calcext:value-type="float">
            <text:p>154</text:p>
          </table:table-cell>
          <table:table-cell table:formula="of:=CONCATENATE(&quot;2nd1-&quot;;TEXT([.D419];&quot;0&quot;))" office:value-type="string" office:string-value="2nd1-28" calcext:value-type="string">
            <text:p>2nd1-28</text:p>
          </table:table-cell>
          <table:table-cell office:value-type="float" office:value="28" calcext:value-type="float">
            <text:p>28</text:p>
          </table:table-cell>
          <table:table-cell office:value-type="string" calcext:value-type="string">
            <text:p>愛姫</text:p>
          </table:table-cell>
          <table:table-cell table:style-name="ce11" table:formula="of:=[.E419]" office:value-type="string" office:string-value="愛姫" calcext:value-type="string">
            <text:p>愛姫</text:p>
          </table:table-cell>
          <table:table-cell office:value-type="string" calcext:value-type="string">
            <text:p>めごひめ</text:p>
          </table:table-cell>
          <table:table-cell table:style-name="ce11" office:value-type="string" calcext:value-type="string">
            <text:p>第５弾ブースターパック</text:p>
          </table:table-cell>
          <table:table-cell table:style-name="ce11" table:formula="of:=VLOOKUP([.H419];[$収録番号.$A$1:$収録番号.$B$10];2;0)" office:value-type="float" office:value="55" calcext:value-type="float">
            <text:p>55</text:p>
          </table:table-cell>
          <table:table-cell office:value-type="string" calcext:value-type="string">
            <text:p>N</text:p>
          </table:table-cell>
          <table:table-cell table:style-name="ce11" table:formula="of:=VLOOKUP([.J419];[$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19];[$種類番号.$A$1:$種類番号.$B$4];2;0)" office:value-type="float" office:value="1" calcext:value-type="float">
            <text:p>1</text:p>
          </table:table-cell>
          <table:table-cell office:value-type="string" calcext:value-type="string">
            <text:p>青</text:p>
          </table:table-cell>
          <table:table-cell table:style-name="ce11" table:formula="of:=VLOOKUP([.N419];[$色番号.$A$1:$色番号.$B$10];2;0)" office:value-type="float" office:value="2" calcext:value-type="float">
            <text:p>2</text:p>
          </table:table-cell>
          <table:table-cell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1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19];[$特性番号.$A$1:$特性番号.$B$8];2;0);0)" office:value-type="float" office:value="0" calcext:value-type="float">
            <text:p>0</text:p>
          </table:table-cell>
          <table:table-cell office:value-type="string" calcext:value-type="string">
            <text:p>この能力は、これが戦場に置かれたときに発動する。相手の手札を見て、マホウ2つまでを墓地に置く。</text:p>
          </table:table-cell>
          <table:table-cell office:value-type="float" office:value="2000" calcext:value-type="float">
            <text:p>2000</text:p>
          </table:table-cell>
          <table:table-cell office:value-type="string" calcext:value-type="string">
            <text:p>1ドローする</text:p>
          </table:table-cell>
          <table:table-cell table:style-name="ce11" table:formula="of:=IFERROR(VLOOKUP([.$X419];[$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28.png</text:p>
          </table:table-cell>
          <table:table-cell table:style-name="ce11" table:formula="of:=CONCATENATE([$JSON.$A$1];[.$C419];[$JSON.$B$1];[.$E419];[$JSON.$C$1];[.F419];[$JSON.$D$1];[.$G419];[$JSON.$E$1];IF(ISNA([.$T419]);&quot;null&quot;;&quot;&quot;&quot;&quot;&amp;[.$T419]&amp;&quot;&quot;&quot;&quot;);[$JSON.$F$1];[.$V419];[$JSON.$G$1];IF(ISNA([.$X419]);&quot;null&quot;;&quot;&quot;&quot;&quot;&amp;[.$X419]&amp;&quot;&quot;&quot;&quot;);[$JSON.$H$1];[.$AA419];[$JSON.$I$1];[.$I419];[$JSON.$J$1];[.K419];[$JSON.$K$1];[.$M419];[$JSON.$L$1];[.$P419];[$JSON.$M$1];[.$O419];[$JSON.$N$1];[.$S419];[$JSON.$O$1];[.$U419];[$JSON.$P$1];IF(ISNA([.$W419]);&quot;null&quot;;[.$W419]);[$JSON.$Q$1];[.$Y419];[$JSON.$R$1];IF([.$Z419];&quot;true&quot;;&quot;false&quot;);[$JSON.$S$1];[.$A419];[$JSON.$T$1];[.$B419];[$JSON.$U$1])" office:value-type="string" office:string-value="{&quot;id&quot;:&quot;2nd1-28&quot;,&quot;name&quot;:&quot;愛姫&quot;,&quot;displayName&quot;:&quot;愛姫&quot;,&quot;kana&quot;:&quot;めごひめ&quot;,&quot;traitText&quot;:null,&quot;ruleText&quot;:&quot;この能力は、これが戦場に置かれたときに発動する。相手の手札を見て、マホウ2つまでを墓地に置く。&quot;,&quot;legacyText&quot;:&quot;1ドローする&quot;,&quot;imageUrl&quot;:&quot;https://one-draw.jp/ijinden/cardlist/005/card/05_028.png&quot;,&quot;expansion&quot;:55,&quot;rarity&quot;:1,&quot;type&quot;:1,&quot;level&quot;:4,&quot;color&quot;:2,&quot;term&quot;:0,&quot;trait&quot;:0,&quot;power&quot;:2000,&quot;legacy&quot;:4,&quot;anyNumCopies&quot;:false,&quot;orderTable&quot;:418,&quot;orderDeck&quot;:154}," calcext:value-type="string">
            <text:p>{"id":"2nd1-28","name":"愛姫","displayName":"愛姫","kana":"めごひめ","traitText":null,"ruleText":"この能力は、これが戦場に置かれたときに発動する。相手の手札を見て、マホウ2つまでを墓地に置く。","legacyText":"1ドローする","imageUrl":"https://one-draw.jp/ijinden/cardlist/005/card/05_028.png","expansion":55,"rarity":1,"type":1,"level":4,"color":2,"term":0,"trait":0,"power":2000,"legacy":4,"anyNumCopies":false,"orderTable":418,"orderDeck":154},</text:p>
          </table:table-cell>
          <table:table-cell table:number-columns-repeated="16356"/>
        </table:table-row>
        <table:table-row table:style-name="ro2">
          <table:table-cell table:style-name="ce11" office:value-type="float" office:value="419" calcext:value-type="float">
            <text:p>419</text:p>
          </table:table-cell>
          <table:table-cell table:style-name="ce11" office:value-type="float" office:value="106" calcext:value-type="float">
            <text:p>106</text:p>
          </table:table-cell>
          <table:table-cell table:formula="of:=CONCATENATE(&quot;2nd1-&quot;;TEXT([.D420];&quot;0&quot;))" office:value-type="string" office:string-value="2nd1-29" calcext:value-type="string">
            <text:p>2nd1-29</text:p>
          </table:table-cell>
          <table:table-cell office:value-type="float" office:value="29" calcext:value-type="float">
            <text:p>29</text:p>
          </table:table-cell>
          <table:table-cell office:value-type="string" calcext:value-type="string">
            <text:p>フェルディナンド・マゼラン</text:p>
          </table:table-cell>
          <table:table-cell office:value-type="string" calcext:value-type="string">
            <text:p>フェルディナンド・マゼラン (第5弾)</text:p>
          </table:table-cell>
          <table:table-cell office:value-type="string" calcext:value-type="string">
            <text:p>ふぇるでぃなんとまぜらん</text:p>
          </table:table-cell>
          <table:table-cell table:style-name="ce11" office:value-type="string" calcext:value-type="string">
            <text:p>第５弾ブースターパック</text:p>
          </table:table-cell>
          <table:table-cell table:style-name="ce11" table:formula="of:=VLOOKUP([.H420];[$収録番号.$A$1:$収録番号.$B$10];2;0)" office:value-type="float" office:value="55" calcext:value-type="float">
            <text:p>55</text:p>
          </table:table-cell>
          <table:table-cell office:value-type="string" calcext:value-type="string">
            <text:p>N</text:p>
          </table:table-cell>
          <table:table-cell table:style-name="ce11" table:formula="of:=VLOOKUP([.J420];[$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20];[$種類番号.$A$1:$種類番号.$B$4];2;0)" office:value-type="float" office:value="1" calcext:value-type="float">
            <text:p>1</text:p>
          </table:table-cell>
          <table:table-cell office:value-type="string" calcext:value-type="string">
            <text:p>青</text:p>
          </table:table-cell>
          <table:table-cell table:style-name="ce11" table:formula="of:=VLOOKUP([.N420];[$色番号.$A$1:$色番号.$B$10];2;0)" office:value-type="float" office:value="2" calcext:value-type="float">
            <text:p>2</text:p>
          </table:table-cell>
          <table:table-cell office:value-type="float" office:value="3" calcext:value-type="float">
            <text:p>3</text:p>
          </table:table-cell>
          <table:table-cell table:style-name="ce11" table:formula="of:=NA()" office:value-type="string" office:string-value="" calcext:value-type="error">
            <text:p>#N/A</text:p>
          </table:table-cell>
          <table:table-cell office:value-type="string" calcext:value-type="string">
            <text:p>航海</text:p>
          </table:table-cell>
          <table:table-cell table:style-name="ce11" table:formula="of:=IFERROR(VLOOKUP([.$R420];[$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420];[$特性番号.$A$1:$特性番号.$B$8];2;0);0)" office:value-type="float" office:value="0" calcext:value-type="float">
            <text:p>0</text:p>
          </table:table-cell>
          <table:table-cell office:value-type="string" calcext:value-type="string">
            <text:p>航海 - この能力は、これがアタッカーになったときに発動する。相手の手札のカード1つを墓地に置く。そのカードは相手が選ぶ。</text:p>
          </table:table-cell>
          <table:table-cell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20];[$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29.png</text:p>
          </table:table-cell>
          <table:table-cell table:style-name="ce11" table:formula="of:=CONCATENATE([$JSON.$A$1];[.$C420];[$JSON.$B$1];[.$E420];[$JSON.$C$1];[.F420];[$JSON.$D$1];[.$G420];[$JSON.$E$1];IF(ISNA([.$T420]);&quot;null&quot;;&quot;&quot;&quot;&quot;&amp;[.$T420]&amp;&quot;&quot;&quot;&quot;);[$JSON.$F$1];[.$V420];[$JSON.$G$1];IF(ISNA([.$X420]);&quot;null&quot;;&quot;&quot;&quot;&quot;&amp;[.$X420]&amp;&quot;&quot;&quot;&quot;);[$JSON.$H$1];[.$AA420];[$JSON.$I$1];[.$I420];[$JSON.$J$1];[.K420];[$JSON.$K$1];[.$M420];[$JSON.$L$1];[.$P420];[$JSON.$M$1];[.$O420];[$JSON.$N$1];[.$S420];[$JSON.$O$1];[.$U420];[$JSON.$P$1];IF(ISNA([.$W420]);&quot;null&quot;;[.$W420]);[$JSON.$Q$1];[.$Y420];[$JSON.$R$1];IF([.$Z420];&quot;true&quot;;&quot;false&quot;);[$JSON.$S$1];[.$A420];[$JSON.$T$1];[.$B420];[$JSON.$U$1])" office:value-type="string" office:string-value="{&quot;id&quot;:&quot;2nd1-29&quot;,&quot;name&quot;:&quot;フェルディナンド・マゼラン&quot;,&quot;displayName&quot;:&quot;フェルディナンド・マゼラン (第5弾)&quot;,&quot;kana&quot;:&quot;ふぇるでぃなんとまぜらん&quot;,&quot;traitText&quot;:null,&quot;ruleText&quot;:&quot;航海 - この能力は、これがアタッカーになったときに発動する。相手の手札のカード1つを墓地に置く。そのカードは相手が選ぶ。&quot;,&quot;legacyText&quot;:null,&quot;imageUrl&quot;:&quot;https://one-draw.jp/ijinden/cardlist/005/card/05_029.png&quot;,&quot;expansion&quot;:55,&quot;rarity&quot;:1,&quot;type&quot;:1,&quot;level&quot;:3,&quot;color&quot;:2,&quot;term&quot;:1,&quot;trait&quot;:0,&quot;power&quot;:3000,&quot;legacy&quot;:0,&quot;anyNumCopies&quot;:false,&quot;orderTable&quot;:419,&quot;orderDeck&quot;:106}," calcext:value-type="string">
            <text:p>{"id":"2nd1-29","name":"フェルディナンド・マゼラン","displayName":"フェルディナンド・マゼラン (第5弾)","kana":"ふぇるでぃなんとまぜらん","traitText":null,"ruleText":"航海 - この能力は、これがアタッカーになったときに発動する。相手の手札のカード1つを墓地に置く。そのカードは相手が選ぶ。","legacyText":null,"imageUrl":"https://one-draw.jp/ijinden/cardlist/005/card/05_029.png","expansion":55,"rarity":1,"type":1,"level":3,"color":2,"term":1,"trait":0,"power":3000,"legacy":0,"anyNumCopies":false,"orderTable":419,"orderDeck":106},</text:p>
          </table:table-cell>
          <table:table-cell table:number-columns-repeated="16356"/>
        </table:table-row>
        <table:table-row table:style-name="ro2">
          <table:table-cell table:style-name="ce11" office:value-type="float" office:value="420" calcext:value-type="float">
            <text:p>420</text:p>
          </table:table-cell>
          <table:table-cell table:style-name="ce11" office:value-type="float" office:value="55" calcext:value-type="float">
            <text:p>55</text:p>
          </table:table-cell>
          <table:table-cell table:formula="of:=CONCATENATE(&quot;2nd1-&quot;;TEXT([.D421];&quot;0&quot;))" office:value-type="string" office:string-value="2nd1-30" calcext:value-type="string">
            <text:p>2nd1-30</text:p>
          </table:table-cell>
          <table:table-cell office:value-type="float" office:value="30" calcext:value-type="float">
            <text:p>30</text:p>
          </table:table-cell>
          <table:table-cell office:value-type="string" calcext:value-type="string">
            <text:p>最上義光</text:p>
          </table:table-cell>
          <table:table-cell table:style-name="ce11" table:formula="of:=[.E421]" office:value-type="string" office:string-value="最上義光" calcext:value-type="string">
            <text:p>最上義光</text:p>
          </table:table-cell>
          <table:table-cell office:value-type="string" calcext:value-type="string">
            <text:p>もがみよしあき</text:p>
          </table:table-cell>
          <table:table-cell table:style-name="ce11" office:value-type="string" calcext:value-type="string">
            <text:p>第５弾ブースターパック</text:p>
          </table:table-cell>
          <table:table-cell table:style-name="ce11" table:formula="of:=VLOOKUP([.H421];[$収録番号.$A$1:$収録番号.$B$10];2;0)" office:value-type="float" office:value="55" calcext:value-type="float">
            <text:p>55</text:p>
          </table:table-cell>
          <table:table-cell office:value-type="string" calcext:value-type="string">
            <text:p>N</text:p>
          </table:table-cell>
          <table:table-cell table:style-name="ce11" table:formula="of:=VLOOKUP([.J421];[$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21];[$種類番号.$A$1:$種類番号.$B$4];2;0)" office:value-type="float" office:value="1" calcext:value-type="float">
            <text:p>1</text:p>
          </table:table-cell>
          <table:table-cell office:value-type="string" calcext:value-type="string">
            <text:p>青</text:p>
          </table:table-cell>
          <table:table-cell table:style-name="ce11" table:formula="of:=VLOOKUP([.N421];[$色番号.$A$1:$色番号.$B$10];2;0)" office:value-type="float" office:value="2" calcext:value-type="float">
            <text:p>2</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21];[$能力語番号.$A$1:$能力語番号.$B$11];2;0);0)" office:value-type="float" office:value="0" calcext:value-type="float">
            <text:p>0</text:p>
          </table:table-cell>
          <table:table-cell office:value-type="string" calcext:value-type="string">
            <text:p>剣術</text:p>
          </table:table-cell>
          <table:table-cell table:style-name="ce11" table:formula="of:=IFERROR(VLOOKUP([.$T421];[$特性番号.$A$1:$特性番号.$B$8];2;0);0)" office:value-type="float" office:value="1" calcext:value-type="float">
            <text:p>1</text:p>
          </table:table-cell>
          <table:table-cell office:value-type="string" calcext:value-type="string">
            <text:p>ブロック+3000</text:p>
          </table:table-cell>
          <table:table-cell office:value-type="float" office:value="1000" calcext:value-type="float">
            <text:p>1000</text:p>
          </table:table-cell>
          <table:table-cell office:value-type="string" calcext:value-type="string">
            <text:p>1ドローする</text:p>
          </table:table-cell>
          <table:table-cell table:style-name="ce11" table:formula="of:=IFERROR(VLOOKUP([.$X421];[$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30.png</text:p>
          </table:table-cell>
          <table:table-cell table:style-name="ce11" table:formula="of:=CONCATENATE([$JSON.$A$1];[.$C421];[$JSON.$B$1];[.$E421];[$JSON.$C$1];[.F421];[$JSON.$D$1];[.$G421];[$JSON.$E$1];IF(ISNA([.$T421]);&quot;null&quot;;&quot;&quot;&quot;&quot;&amp;[.$T421]&amp;&quot;&quot;&quot;&quot;);[$JSON.$F$1];[.$V421];[$JSON.$G$1];IF(ISNA([.$X421]);&quot;null&quot;;&quot;&quot;&quot;&quot;&amp;[.$X421]&amp;&quot;&quot;&quot;&quot;);[$JSON.$H$1];[.$AA421];[$JSON.$I$1];[.$I421];[$JSON.$J$1];[.K421];[$JSON.$K$1];[.$M421];[$JSON.$L$1];[.$P421];[$JSON.$M$1];[.$O421];[$JSON.$N$1];[.$S421];[$JSON.$O$1];[.$U421];[$JSON.$P$1];IF(ISNA([.$W421]);&quot;null&quot;;[.$W421]);[$JSON.$Q$1];[.$Y421];[$JSON.$R$1];IF([.$Z421];&quot;true&quot;;&quot;false&quot;);[$JSON.$S$1];[.$A421];[$JSON.$T$1];[.$B421];[$JSON.$U$1])" office:value-type="string" office:string-value="{&quot;id&quot;:&quot;2nd1-30&quot;,&quot;name&quot;:&quot;最上義光&quot;,&quot;displayName&quot;:&quot;最上義光&quot;,&quot;kana&quot;:&quot;もがみよしあき&quot;,&quot;traitText&quot;:&quot;剣術&quot;,&quot;ruleText&quot;:&quot;ブロック+3000&quot;,&quot;legacyText&quot;:&quot;1ドローする&quot;,&quot;imageUrl&quot;:&quot;https://one-draw.jp/ijinden/cardlist/005/card/05_030.png&quot;,&quot;expansion&quot;:55,&quot;rarity&quot;:1,&quot;type&quot;:1,&quot;level&quot;:2,&quot;color&quot;:2,&quot;term&quot;:0,&quot;trait&quot;:1,&quot;power&quot;:1000,&quot;legacy&quot;:4,&quot;anyNumCopies&quot;:false,&quot;orderTable&quot;:420,&quot;orderDeck&quot;:55}," calcext:value-type="string">
            <text:p>{"id":"2nd1-30","name":"最上義光","displayName":"最上義光","kana":"もがみよしあき","traitText":"剣術","ruleText":"ブロック+3000","legacyText":"1ドローする","imageUrl":"https://one-draw.jp/ijinden/cardlist/005/card/05_030.png","expansion":55,"rarity":1,"type":1,"level":2,"color":2,"term":0,"trait":1,"power":1000,"legacy":4,"anyNumCopies":false,"orderTable":420,"orderDeck":55},</text:p>
          </table:table-cell>
          <table:table-cell table:number-columns-repeated="16356"/>
        </table:table-row>
        <table:table-row table:style-name="ro2">
          <table:table-cell table:style-name="ce11" office:value-type="float" office:value="421" calcext:value-type="float">
            <text:p>421</text:p>
          </table:table-cell>
          <table:table-cell table:style-name="ce11" office:value-type="float" office:value="18" calcext:value-type="float">
            <text:p>18</text:p>
          </table:table-cell>
          <table:table-cell table:formula="of:=CONCATENATE(&quot;2nd1-&quot;;TEXT([.D422];&quot;0&quot;))" office:value-type="string" office:string-value="2nd1-31" calcext:value-type="string">
            <text:p>2nd1-31</text:p>
          </table:table-cell>
          <table:table-cell office:value-type="float" office:value="31" calcext:value-type="float">
            <text:p>31</text:p>
          </table:table-cell>
          <table:table-cell office:value-type="string" calcext:value-type="string">
            <text:p>卑弥呼</text:p>
          </table:table-cell>
          <table:table-cell office:value-type="string" calcext:value-type="string">
            <text:p>卑弥呼 (第5弾)</text:p>
          </table:table-cell>
          <table:table-cell office:value-type="string" calcext:value-type="string">
            <text:p>ひみこ</text:p>
          </table:table-cell>
          <table:table-cell table:style-name="ce11" office:value-type="string" calcext:value-type="string">
            <text:p>第５弾ブースターパック</text:p>
          </table:table-cell>
          <table:table-cell table:style-name="ce11" table:formula="of:=VLOOKUP([.H422];[$収録番号.$A$1:$収録番号.$B$10];2;0)" office:value-type="float" office:value="55" calcext:value-type="float">
            <text:p>55</text:p>
          </table:table-cell>
          <table:table-cell office:value-type="string" calcext:value-type="string">
            <text:p>N</text:p>
          </table:table-cell>
          <table:table-cell table:style-name="ce11" table:formula="of:=VLOOKUP([.J422];[$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22];[$種類番号.$A$1:$種類番号.$B$4];2;0)" office:value-type="float" office:value="1" calcext:value-type="float">
            <text:p>1</text:p>
          </table:table-cell>
          <table:table-cell office:value-type="string" calcext:value-type="string">
            <text:p>緑</text:p>
          </table:table-cell>
          <table:table-cell table:style-name="ce11" table:formula="of:=VLOOKUP([.N422];[$色番号.$A$1:$色番号.$B$10];2;0)" office:value-type="float" office:value="4" calcext:value-type="float">
            <text:p>4</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2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22];[$特性番号.$A$1:$特性番号.$B$8];2;0);0)" office:value-type="float" office:value="0" calcext:value-type="float">
            <text:p>0</text:p>
          </table:table-cell>
          <table:table-cell office:value-type="string" calcext:value-type="string">
            <text:p>この能力は、これが戦場に置かれたときに発動する。自分の山札の上からカード1つを裏のまま魔力ゾーンに置く。</text:p>
          </table:table-cell>
          <table:table-cell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422];[$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31.png</text:p>
          </table:table-cell>
          <table:table-cell table:style-name="ce11" table:formula="of:=CONCATENATE([$JSON.$A$1];[.$C422];[$JSON.$B$1];[.$E422];[$JSON.$C$1];[.F422];[$JSON.$D$1];[.$G422];[$JSON.$E$1];IF(ISNA([.$T422]);&quot;null&quot;;&quot;&quot;&quot;&quot;&amp;[.$T422]&amp;&quot;&quot;&quot;&quot;);[$JSON.$F$1];[.$V422];[$JSON.$G$1];IF(ISNA([.$X422]);&quot;null&quot;;&quot;&quot;&quot;&quot;&amp;[.$X422]&amp;&quot;&quot;&quot;&quot;);[$JSON.$H$1];[.$AA422];[$JSON.$I$1];[.$I422];[$JSON.$J$1];[.K422];[$JSON.$K$1];[.$M422];[$JSON.$L$1];[.$P422];[$JSON.$M$1];[.$O422];[$JSON.$N$1];[.$S422];[$JSON.$O$1];[.$U422];[$JSON.$P$1];IF(ISNA([.$W422]);&quot;null&quot;;[.$W422]);[$JSON.$Q$1];[.$Y422];[$JSON.$R$1];IF([.$Z422];&quot;true&quot;;&quot;false&quot;);[$JSON.$S$1];[.$A422];[$JSON.$T$1];[.$B422];[$JSON.$U$1])" office:value-type="string" office:string-value="{&quot;id&quot;:&quot;2nd1-31&quot;,&quot;name&quot;:&quot;卑弥呼&quot;,&quot;displayName&quot;:&quot;卑弥呼 (第5弾)&quot;,&quot;kana&quot;:&quot;ひみこ&quot;,&quot;traitText&quot;:null,&quot;ruleText&quot;:&quot;この能力は、これが戦場に置かれたときに発動する。自分の山札の上からカード1つを裏のまま魔力ゾーンに置く。&quot;,&quot;legacyText&quot;:null,&quot;imageUrl&quot;:&quot;https://one-draw.jp/ijinden/cardlist/005/card/05_031.png&quot;,&quot;expansion&quot;:55,&quot;rarity&quot;:1,&quot;type&quot;:1,&quot;level&quot;:1,&quot;color&quot;:4,&quot;term&quot;:0,&quot;trait&quot;:0,&quot;power&quot;:500,&quot;legacy&quot;:0,&quot;anyNumCopies&quot;:false,&quot;orderTable&quot;:421,&quot;orderDeck&quot;:18}," calcext:value-type="string">
            <text:p>{"id":"2nd1-31","name":"卑弥呼","displayName":"卑弥呼 (第5弾)","kana":"ひみこ","traitText":null,"ruleText":"この能力は、これが戦場に置かれたときに発動する。自分の山札の上からカード1つを裏のまま魔力ゾーンに置く。","legacyText":null,"imageUrl":"https://one-draw.jp/ijinden/cardlist/005/card/05_031.png","expansion":55,"rarity":1,"type":1,"level":1,"color":4,"term":0,"trait":0,"power":500,"legacy":0,"anyNumCopies":false,"orderTable":421,"orderDeck":18},</text:p>
          </table:table-cell>
          <table:table-cell table:number-columns-repeated="16356"/>
        </table:table-row>
        <table:table-row table:style-name="ro2">
          <table:table-cell table:style-name="ce11" office:value-type="float" office:value="422" calcext:value-type="float">
            <text:p>422</text:p>
          </table:table-cell>
          <table:table-cell table:style-name="ce11" office:value-type="float" office:value="64" calcext:value-type="float">
            <text:p>64</text:p>
          </table:table-cell>
          <table:table-cell table:formula="of:=CONCATENATE(&quot;2nd1-&quot;;TEXT([.D423];&quot;0&quot;))" office:value-type="string" office:string-value="2nd1-32" calcext:value-type="string">
            <text:p>2nd1-32</text:p>
          </table:table-cell>
          <table:table-cell office:value-type="float" office:value="32" calcext:value-type="float">
            <text:p>32</text:p>
          </table:table-cell>
          <table:table-cell office:value-type="string" calcext:value-type="string">
            <text:p>壱与</text:p>
          </table:table-cell>
          <table:table-cell table:style-name="ce11" table:formula="of:=[.E423]" office:value-type="string" office:string-value="壱与" calcext:value-type="string">
            <text:p>壱与</text:p>
          </table:table-cell>
          <table:table-cell office:value-type="string" calcext:value-type="string">
            <text:p>いよ</text:p>
          </table:table-cell>
          <table:table-cell table:style-name="ce11" office:value-type="string" calcext:value-type="string">
            <text:p>第５弾ブースターパック</text:p>
          </table:table-cell>
          <table:table-cell table:style-name="ce11" table:formula="of:=VLOOKUP([.H423];[$収録番号.$A$1:$収録番号.$B$10];2;0)" office:value-type="float" office:value="55" calcext:value-type="float">
            <text:p>55</text:p>
          </table:table-cell>
          <table:table-cell office:value-type="string" calcext:value-type="string">
            <text:p>R</text:p>
          </table:table-cell>
          <table:table-cell table:style-name="ce11" table:formula="of:=VLOOKUP([.J423];[$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23];[$種類番号.$A$1:$種類番号.$B$4];2;0)" office:value-type="float" office:value="1" calcext:value-type="float">
            <text:p>1</text:p>
          </table:table-cell>
          <table:table-cell office:value-type="string" calcext:value-type="string">
            <text:p>緑</text:p>
          </table:table-cell>
          <table:table-cell table:style-name="ce11" table:formula="of:=VLOOKUP([.N423];[$色番号.$A$1:$色番号.$B$10];2;0)" office:value-type="float" office:value="4" calcext:value-type="float">
            <text:p>4</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2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23];[$特性番号.$A$1:$特性番号.$B$8];2;0);0)" office:value-type="float" office:value="0" calcext:value-type="float">
            <text:p>0</text:p>
          </table:table-cell>
          <table:table-cell office:value-type="string" calcext:value-type="string">
            <text:p>この能力は戦場で効果を発揮する。自分の魔力レベルは、自分の魔力ゾーンの裏のカード1つにつき1だけ上がる。</text:p>
          </table:table-cell>
          <table:table-cell office:value-type="float" office:value="500" calcext:value-type="float">
            <text:p>500</text:p>
          </table:table-cell>
          <table:table-cell table:style-name="ce25" table:formula="of:=NA()" office:value-type="string" office:string-value="" calcext:value-type="error">
            <text:p>#N/A</text:p>
          </table:table-cell>
          <table:table-cell table:style-name="ce11" table:formula="of:=IFERROR(VLOOKUP([.$X423];[$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32.png</text:p>
          </table:table-cell>
          <table:table-cell table:style-name="ce11" table:formula="of:=CONCATENATE([$JSON.$A$1];[.$C423];[$JSON.$B$1];[.$E423];[$JSON.$C$1];[.F423];[$JSON.$D$1];[.$G423];[$JSON.$E$1];IF(ISNA([.$T423]);&quot;null&quot;;&quot;&quot;&quot;&quot;&amp;[.$T423]&amp;&quot;&quot;&quot;&quot;);[$JSON.$F$1];[.$V423];[$JSON.$G$1];IF(ISNA([.$X423]);&quot;null&quot;;&quot;&quot;&quot;&quot;&amp;[.$X423]&amp;&quot;&quot;&quot;&quot;);[$JSON.$H$1];[.$AA423];[$JSON.$I$1];[.$I423];[$JSON.$J$1];[.K423];[$JSON.$K$1];[.$M423];[$JSON.$L$1];[.$P423];[$JSON.$M$1];[.$O423];[$JSON.$N$1];[.$S423];[$JSON.$O$1];[.$U423];[$JSON.$P$1];IF(ISNA([.$W423]);&quot;null&quot;;[.$W423]);[$JSON.$Q$1];[.$Y423];[$JSON.$R$1];IF([.$Z423];&quot;true&quot;;&quot;false&quot;);[$JSON.$S$1];[.$A423];[$JSON.$T$1];[.$B423];[$JSON.$U$1])" office:value-type="string" office:string-value="{&quot;id&quot;:&quot;2nd1-32&quot;,&quot;name&quot;:&quot;壱与&quot;,&quot;displayName&quot;:&quot;壱与&quot;,&quot;kana&quot;:&quot;いよ&quot;,&quot;traitText&quot;:null,&quot;ruleText&quot;:&quot;この能力は戦場で効果を発揮する。自分の魔力レベルは、自分の魔力ゾーンの裏のカード1つにつき1だけ上がる。&quot;,&quot;legacyText&quot;:null,&quot;imageUrl&quot;:&quot;https://one-draw.jp/ijinden/cardlist/005/card/05_032.png&quot;,&quot;expansion&quot;:55,&quot;rarity&quot;:2,&quot;type&quot;:1,&quot;level&quot;:2,&quot;color&quot;:4,&quot;term&quot;:0,&quot;trait&quot;:0,&quot;power&quot;:500,&quot;legacy&quot;:0,&quot;anyNumCopies&quot;:false,&quot;orderTable&quot;:422,&quot;orderDeck&quot;:64}," calcext:value-type="string">
            <text:p>{"id":"2nd1-32","name":"壱与","displayName":"壱与","kana":"いよ","traitText":null,"ruleText":"この能力は戦場で効果を発揮する。自分の魔力レベルは、自分の魔力ゾーンの裏のカード1つにつき1だけ上がる。","legacyText":null,"imageUrl":"https://one-draw.jp/ijinden/cardlist/005/card/05_032.png","expansion":55,"rarity":2,"type":1,"level":2,"color":4,"term":0,"trait":0,"power":500,"legacy":0,"anyNumCopies":false,"orderTable":422,"orderDeck":64},</text:p>
          </table:table-cell>
          <table:table-cell table:number-columns-repeated="16356"/>
        </table:table-row>
        <table:table-row table:style-name="ro2">
          <table:table-cell table:style-name="ce11" office:value-type="float" office:value="423" calcext:value-type="float">
            <text:p>423</text:p>
          </table:table-cell>
          <table:table-cell table:style-name="ce11" office:value-type="float" office:value="117" calcext:value-type="float">
            <text:p>117</text:p>
          </table:table-cell>
          <table:table-cell table:formula="of:=CONCATENATE(&quot;2nd1-&quot;;TEXT([.D424];&quot;0&quot;))" office:value-type="string" office:string-value="2nd1-33" calcext:value-type="string">
            <text:p>2nd1-33</text:p>
          </table:table-cell>
          <table:table-cell office:value-type="float" office:value="33" calcext:value-type="float">
            <text:p>33</text:p>
          </table:table-cell>
          <table:table-cell office:value-type="string" calcext:value-type="string">
            <text:p>与謝蕪村</text:p>
          </table:table-cell>
          <table:table-cell table:style-name="ce11" table:formula="of:=[.E424]" office:value-type="string" office:string-value="与謝蕪村" calcext:value-type="string">
            <text:p>与謝蕪村</text:p>
          </table:table-cell>
          <table:table-cell office:value-type="string" calcext:value-type="string">
            <text:p>よさぶそん</text:p>
          </table:table-cell>
          <table:table-cell table:style-name="ce11" office:value-type="string" calcext:value-type="string">
            <text:p>第５弾ブースターパック</text:p>
          </table:table-cell>
          <table:table-cell table:style-name="ce11" table:formula="of:=VLOOKUP([.H424];[$収録番号.$A$1:$収録番号.$B$10];2;0)" office:value-type="float" office:value="55" calcext:value-type="float">
            <text:p>55</text:p>
          </table:table-cell>
          <table:table-cell office:value-type="string" calcext:value-type="string">
            <text:p>N</text:p>
          </table:table-cell>
          <table:table-cell table:style-name="ce11" table:formula="of:=VLOOKUP([.J424];[$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24];[$種類番号.$A$1:$種類番号.$B$4];2;0)" office:value-type="float" office:value="1" calcext:value-type="float">
            <text:p>1</text:p>
          </table:table-cell>
          <table:table-cell office:value-type="string" calcext:value-type="string">
            <text:p>緑</text:p>
          </table:table-cell>
          <table:table-cell table:style-name="ce11" table:formula="of:=VLOOKUP([.N424];[$色番号.$A$1:$色番号.$B$10];2;0)" office:value-type="float" office:value="4" calcext:value-type="float">
            <text:p>4</text:p>
          </table:table-cell>
          <table:table-cell office:value-type="float" office:value="3" calcext:value-type="float">
            <text:p>3</text:p>
          </table:table-cell>
          <table:table-cell table:style-name="ce11" table:formula="of:=NA()" office:value-type="string" office:string-value="" calcext:value-type="error">
            <text:p>#N/A</text:p>
          </table:table-cell>
          <table:table-cell office:value-type="string" calcext:value-type="string">
            <text:p>執筆</text:p>
          </table:table-cell>
          <table:table-cell table:style-name="ce11" table:formula="of:=IFERROR(VLOOKUP([.$R424];[$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424];[$特性番号.$A$1:$特性番号.$B$8];2;0);0)" office:value-type="float" office:value="0" calcext:value-type="float">
            <text:p>0</text:p>
          </table:table-cell>
          <table:table-cell office:value-type="string" calcext:value-type="string">
            <text:p>執筆 - この能力は、ターンに1回だけ、戦場で発動する。ハイケイが自分か相手の戦場に置かれたときに発動できる。自分の山札の上からカード2つを裏のまま魔力ゾーンに置く。</text:p>
          </table:table-cell>
          <table:table-cell office:value-type="float" office:value="2000" calcext:value-type="float">
            <text:p>2000</text:p>
          </table:table-cell>
          <table:table-cell office:value-type="string" calcext:value-type="string">
            <text:p>1ドローする</text:p>
          </table:table-cell>
          <table:table-cell table:style-name="ce11" table:formula="of:=IFERROR(VLOOKUP([.$X424];[$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33.png</text:p>
          </table:table-cell>
          <table:table-cell table:style-name="ce11" table:formula="of:=CONCATENATE([$JSON.$A$1];[.$C424];[$JSON.$B$1];[.$E424];[$JSON.$C$1];[.F424];[$JSON.$D$1];[.$G424];[$JSON.$E$1];IF(ISNA([.$T424]);&quot;null&quot;;&quot;&quot;&quot;&quot;&amp;[.$T424]&amp;&quot;&quot;&quot;&quot;);[$JSON.$F$1];[.$V424];[$JSON.$G$1];IF(ISNA([.$X424]);&quot;null&quot;;&quot;&quot;&quot;&quot;&amp;[.$X424]&amp;&quot;&quot;&quot;&quot;);[$JSON.$H$1];[.$AA424];[$JSON.$I$1];[.$I424];[$JSON.$J$1];[.K424];[$JSON.$K$1];[.$M424];[$JSON.$L$1];[.$P424];[$JSON.$M$1];[.$O424];[$JSON.$N$1];[.$S424];[$JSON.$O$1];[.$U424];[$JSON.$P$1];IF(ISNA([.$W424]);&quot;null&quot;;[.$W424]);[$JSON.$Q$1];[.$Y424];[$JSON.$R$1];IF([.$Z424];&quot;true&quot;;&quot;false&quot;);[$JSON.$S$1];[.$A424];[$JSON.$T$1];[.$B424];[$JSON.$U$1])" office:value-type="string" office:string-value="{&quot;id&quot;:&quot;2nd1-33&quot;,&quot;name&quot;:&quot;与謝蕪村&quot;,&quot;displayName&quot;:&quot;与謝蕪村&quot;,&quot;kana&quot;:&quot;よさぶそん&quot;,&quot;traitText&quot;:null,&quot;ruleText&quot;:&quot;執筆 - この能力は、ターンに1回だけ、戦場で発動する。ハイケイが自分か相手の戦場に置かれたときに発動できる。自分の山札の上からカード2つを裏のまま魔力ゾーンに置く。&quot;,&quot;legacyText&quot;:&quot;1ドローする&quot;,&quot;imageUrl&quot;:&quot;https://one-draw.jp/ijinden/cardlist/005/card/05_033.png&quot;,&quot;expansion&quot;:55,&quot;rarity&quot;:1,&quot;type&quot;:1,&quot;level&quot;:3,&quot;color&quot;:4,&quot;term&quot;:2,&quot;trait&quot;:0,&quot;power&quot;:2000,&quot;legacy&quot;:4,&quot;anyNumCopies&quot;:false,&quot;orderTable&quot;:423,&quot;orderDeck&quot;:117}," calcext:value-type="string">
            <text:p>{"id":"2nd1-33","name":"与謝蕪村","displayName":"与謝蕪村","kana":"よさぶそん","traitText":null,"ruleText":"執筆 - この能力は、ターンに1回だけ、戦場で発動する。ハイケイが自分か相手の戦場に置かれたときに発動できる。自分の山札の上からカード2つを裏のまま魔力ゾーンに置く。","legacyText":"1ドローする","imageUrl":"https://one-draw.jp/ijinden/cardlist/005/card/05_033.png","expansion":55,"rarity":1,"type":1,"level":3,"color":4,"term":2,"trait":0,"power":2000,"legacy":4,"anyNumCopies":false,"orderTable":423,"orderDeck":117},</text:p>
          </table:table-cell>
          <table:table-cell table:number-columns-repeated="16356"/>
        </table:table-row>
        <table:table-row table:style-name="ro2">
          <table:table-cell table:style-name="ce11" office:value-type="float" office:value="424" calcext:value-type="float">
            <text:p>424</text:p>
          </table:table-cell>
          <table:table-cell table:style-name="ce11" office:value-type="float" office:value="270" calcext:value-type="float">
            <text:p>270</text:p>
          </table:table-cell>
          <table:table-cell table:formula="of:=CONCATENATE(&quot;2nd1-&quot;;TEXT([.D425];&quot;0&quot;))" office:value-type="string" office:string-value="2nd1-34" calcext:value-type="string">
            <text:p>2nd1-34</text:p>
          </table:table-cell>
          <table:table-cell office:value-type="float" office:value="34" calcext:value-type="float">
            <text:p>34</text:p>
          </table:table-cell>
          <table:table-cell office:value-type="string" calcext:value-type="string">
            <text:p>徳川秀忠</text:p>
          </table:table-cell>
          <table:table-cell table:style-name="ce11" table:formula="of:=[.E425]" office:value-type="string" office:string-value="徳川秀忠" calcext:value-type="string">
            <text:p>徳川秀忠</text:p>
          </table:table-cell>
          <table:table-cell office:value-type="string" calcext:value-type="string">
            <text:p>とくがわひでただ</text:p>
          </table:table-cell>
          <table:table-cell table:style-name="ce11" office:value-type="string" calcext:value-type="string">
            <text:p>第５弾ブースターパック</text:p>
          </table:table-cell>
          <table:table-cell table:style-name="ce11" table:formula="of:=VLOOKUP([.H425];[$収録番号.$A$1:$収録番号.$B$10];2;0)" office:value-type="float" office:value="55" calcext:value-type="float">
            <text:p>55</text:p>
          </table:table-cell>
          <table:table-cell office:value-type="string" calcext:value-type="string">
            <text:p>R</text:p>
          </table:table-cell>
          <table:table-cell table:style-name="ce11" table:formula="of:=VLOOKUP([.J425];[$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25];[$種類番号.$A$1:$種類番号.$B$4];2;0)" office:value-type="float" office:value="1" calcext:value-type="float">
            <text:p>1</text:p>
          </table:table-cell>
          <table:table-cell office:value-type="string" calcext:value-type="string">
            <text:p>緑</text:p>
          </table:table-cell>
          <table:table-cell table:style-name="ce11" table:formula="of:=VLOOKUP([.N425];[$色番号.$A$1:$色番号.$B$10];2;0)" office:value-type="float" office:value="4" calcext:value-type="float">
            <text:p>4</text:p>
          </table:table-cell>
          <table:table-cell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2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25];[$特性番号.$A$1:$特性番号.$B$8];2;0);0)" office:value-type="float" office:value="0" calcext:value-type="float">
            <text:p>0</text:p>
          </table:table-cell>
          <table:table-cell office:value-type="string" calcext:value-type="string">
            <text:p>この能力は、これが戦場に置かれたとき、相手の魔力ゾーンに裏のカードが2つ以上あるなら発動する。イジン召喚権+2する。¶ダブルプレッシャー</text:p>
          </table:table-cell>
          <table:table-cell office:value-type="float" office:value="6000" calcext:value-type="float">
            <text:p>6000</text:p>
          </table:table-cell>
          <table:table-cell office:value-type="string" calcext:value-type="string">
            <text:p>魔力化</text:p>
          </table:table-cell>
          <table:table-cell table:style-name="ce11" table:formula="of:=IFERROR(VLOOKUP([.$X425];[$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34.png</text:p>
          </table:table-cell>
          <table:table-cell table:style-name="ce11" table:formula="of:=CONCATENATE([$JSON.$A$1];[.$C425];[$JSON.$B$1];[.$E425];[$JSON.$C$1];[.F425];[$JSON.$D$1];[.$G425];[$JSON.$E$1];IF(ISNA([.$T425]);&quot;null&quot;;&quot;&quot;&quot;&quot;&amp;[.$T425]&amp;&quot;&quot;&quot;&quot;);[$JSON.$F$1];[.$V425];[$JSON.$G$1];IF(ISNA([.$X425]);&quot;null&quot;;&quot;&quot;&quot;&quot;&amp;[.$X425]&amp;&quot;&quot;&quot;&quot;);[$JSON.$H$1];[.$AA425];[$JSON.$I$1];[.$I425];[$JSON.$J$1];[.K425];[$JSON.$K$1];[.$M425];[$JSON.$L$1];[.$P425];[$JSON.$M$1];[.$O425];[$JSON.$N$1];[.$S425];[$JSON.$O$1];[.$U425];[$JSON.$P$1];IF(ISNA([.$W425]);&quot;null&quot;;[.$W425]);[$JSON.$Q$1];[.$Y425];[$JSON.$R$1];IF([.$Z425];&quot;true&quot;;&quot;false&quot;);[$JSON.$S$1];[.$A425];[$JSON.$T$1];[.$B425];[$JSON.$U$1])" office:value-type="string" office:string-value="{&quot;id&quot;:&quot;2nd1-34&quot;,&quot;name&quot;:&quot;徳川秀忠&quot;,&quot;displayName&quot;:&quot;徳川秀忠&quot;,&quot;kana&quot;:&quot;とくがわひでただ&quot;,&quot;traitText&quot;:null,&quot;ruleText&quot;:&quot;この能力は、これが戦場に置かれたとき、相手の魔力ゾーンに裏のカードが2つ以上あるなら発動する。イジン召喚権+2する。¶ダブルプレッシャー&quot;,&quot;legacyText&quot;:&quot;魔力化&quot;,&quot;imageUrl&quot;:&quot;https://one-draw.jp/ijinden/cardlist/005/card/05_034.png&quot;,&quot;expansion&quot;:55,&quot;rarity&quot;:2,&quot;type&quot;:1,&quot;level&quot;:7,&quot;color&quot;:4,&quot;term&quot;:0,&quot;trait&quot;:0,&quot;power&quot;:6000,&quot;legacy&quot;:1,&quot;anyNumCopies&quot;:false,&quot;orderTable&quot;:424,&quot;orderDeck&quot;:270}," calcext:value-type="string">
            <text:p>{"id":"2nd1-34","name":"徳川秀忠","displayName":"徳川秀忠","kana":"とくがわひでただ","traitText":null,"ruleText":"この能力は、これが戦場に置かれたとき、相手の魔力ゾーンに裏のカードが2つ以上あるなら発動する。イジン召喚権+2する。¶ダブルプレッシャー","legacyText":"魔力化","imageUrl":"https://one-draw.jp/ijinden/cardlist/005/card/05_034.png","expansion":55,"rarity":2,"type":1,"level":7,"color":4,"term":0,"trait":0,"power":6000,"legacy":1,"anyNumCopies":false,"orderTable":424,"orderDeck":270},</text:p>
          </table:table-cell>
          <table:table-cell table:number-columns-repeated="16356"/>
        </table:table-row>
        <table:table-row table:style-name="ro2">
          <table:table-cell table:style-name="ce11" office:value-type="float" office:value="425" calcext:value-type="float">
            <text:p>425</text:p>
          </table:table-cell>
          <table:table-cell table:style-name="ce11" office:value-type="float" office:value="164" calcext:value-type="float">
            <text:p>164</text:p>
          </table:table-cell>
          <table:table-cell table:formula="of:=CONCATENATE(&quot;2nd1-&quot;;TEXT([.D426];&quot;0&quot;))" office:value-type="string" office:string-value="2nd1-35" calcext:value-type="string">
            <text:p>2nd1-35</text:p>
          </table:table-cell>
          <table:table-cell office:value-type="float" office:value="35" calcext:value-type="float">
            <text:p>35</text:p>
          </table:table-cell>
          <table:table-cell office:value-type="string" calcext:value-type="string">
            <text:p>小林一茶</text:p>
          </table:table-cell>
          <table:table-cell table:style-name="ce11" table:formula="of:=[.E426]" office:value-type="string" office:string-value="小林一茶" calcext:value-type="string">
            <text:p>小林一茶</text:p>
          </table:table-cell>
          <table:table-cell office:value-type="string" calcext:value-type="string">
            <text:p>こばやしいっさ</text:p>
          </table:table-cell>
          <table:table-cell table:style-name="ce11" office:value-type="string" calcext:value-type="string">
            <text:p>第５弾ブースターパック</text:p>
          </table:table-cell>
          <table:table-cell table:style-name="ce11" table:formula="of:=VLOOKUP([.H426];[$収録番号.$A$1:$収録番号.$B$10];2;0)" office:value-type="float" office:value="55" calcext:value-type="float">
            <text:p>55</text:p>
          </table:table-cell>
          <table:table-cell office:value-type="string" calcext:value-type="string">
            <text:p>N</text:p>
          </table:table-cell>
          <table:table-cell table:style-name="ce11" table:formula="of:=VLOOKUP([.J426];[$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26];[$種類番号.$A$1:$種類番号.$B$4];2;0)" office:value-type="float" office:value="1" calcext:value-type="float">
            <text:p>1</text:p>
          </table:table-cell>
          <table:table-cell office:value-type="string" calcext:value-type="string">
            <text:p>緑</text:p>
          </table:table-cell>
          <table:table-cell table:style-name="ce11" table:formula="of:=VLOOKUP([.N426];[$色番号.$A$1:$色番号.$B$10];2;0)" office:value-type="float" office:value="4" calcext:value-type="float">
            <text:p>4</text:p>
          </table:table-cell>
          <table:table-cell office:value-type="float" office:value="4" calcext:value-type="float">
            <text:p>4</text:p>
          </table:table-cell>
          <table:table-cell table:style-name="ce11" table:formula="of:=NA()" office:value-type="string" office:string-value="" calcext:value-type="error">
            <text:p>#N/A</text:p>
          </table:table-cell>
          <table:table-cell office:value-type="string" calcext:value-type="string">
            <text:p>執筆</text:p>
          </table:table-cell>
          <table:table-cell table:style-name="ce11" table:formula="of:=IFERROR(VLOOKUP([.$R426];[$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426];[$特性番号.$A$1:$特性番号.$B$8];2;0);0)" office:value-type="float" office:value="0" calcext:value-type="float">
            <text:p>0</text:p>
          </table:table-cell>
          <table:table-cell office:value-type="string" calcext:value-type="string">
            <text:p>執筆 - この能力は、ハイケイが自分か相手の戦場に置かれたときに戦場で発動できる。1ドローする。</text:p>
          </table:table-cell>
          <table:table-cell office:value-type="float" office:value="3000" calcext:value-type="float">
            <text:p>3000</text:p>
          </table:table-cell>
          <table:table-cell office:value-type="string" calcext:value-type="string">
            <text:p>1ドローする</text:p>
          </table:table-cell>
          <table:table-cell table:style-name="ce11" table:formula="of:=IFERROR(VLOOKUP([.$X426];[$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35.png</text:p>
          </table:table-cell>
          <table:table-cell table:style-name="ce11" table:formula="of:=CONCATENATE([$JSON.$A$1];[.$C426];[$JSON.$B$1];[.$E426];[$JSON.$C$1];[.F426];[$JSON.$D$1];[.$G426];[$JSON.$E$1];IF(ISNA([.$T426]);&quot;null&quot;;&quot;&quot;&quot;&quot;&amp;[.$T426]&amp;&quot;&quot;&quot;&quot;);[$JSON.$F$1];[.$V426];[$JSON.$G$1];IF(ISNA([.$X426]);&quot;null&quot;;&quot;&quot;&quot;&quot;&amp;[.$X426]&amp;&quot;&quot;&quot;&quot;);[$JSON.$H$1];[.$AA426];[$JSON.$I$1];[.$I426];[$JSON.$J$1];[.K426];[$JSON.$K$1];[.$M426];[$JSON.$L$1];[.$P426];[$JSON.$M$1];[.$O426];[$JSON.$N$1];[.$S426];[$JSON.$O$1];[.$U426];[$JSON.$P$1];IF(ISNA([.$W426]);&quot;null&quot;;[.$W426]);[$JSON.$Q$1];[.$Y426];[$JSON.$R$1];IF([.$Z426];&quot;true&quot;;&quot;false&quot;);[$JSON.$S$1];[.$A426];[$JSON.$T$1];[.$B426];[$JSON.$U$1])" office:value-type="string" office:string-value="{&quot;id&quot;:&quot;2nd1-35&quot;,&quot;name&quot;:&quot;小林一茶&quot;,&quot;displayName&quot;:&quot;小林一茶&quot;,&quot;kana&quot;:&quot;こばやしいっさ&quot;,&quot;traitText&quot;:null,&quot;ruleText&quot;:&quot;執筆 - この能力は、ハイケイが自分か相手の戦場に置かれたときに戦場で発動できる。1ドローする。&quot;,&quot;legacyText&quot;:&quot;1ドローする&quot;,&quot;imageUrl&quot;:&quot;https://one-draw.jp/ijinden/cardlist/005/card/05_035.png&quot;,&quot;expansion&quot;:55,&quot;rarity&quot;:1,&quot;type&quot;:1,&quot;level&quot;:4,&quot;color&quot;:4,&quot;term&quot;:2,&quot;trait&quot;:0,&quot;power&quot;:3000,&quot;legacy&quot;:4,&quot;anyNumCopies&quot;:false,&quot;orderTable&quot;:425,&quot;orderDeck&quot;:164}," calcext:value-type="string">
            <text:p>{"id":"2nd1-35","name":"小林一茶","displayName":"小林一茶","kana":"こばやしいっさ","traitText":null,"ruleText":"執筆 - この能力は、ハイケイが自分か相手の戦場に置かれたときに戦場で発動できる。1ドローする。","legacyText":"1ドローする","imageUrl":"https://one-draw.jp/ijinden/cardlist/005/card/05_035.png","expansion":55,"rarity":1,"type":1,"level":4,"color":4,"term":2,"trait":0,"power":3000,"legacy":4,"anyNumCopies":false,"orderTable":425,"orderDeck":164},</text:p>
          </table:table-cell>
          <table:table-cell table:number-columns-repeated="16356"/>
        </table:table-row>
        <table:table-row table:style-name="ro2">
          <table:table-cell table:style-name="ce11" office:value-type="float" office:value="426" calcext:value-type="float">
            <text:p>426</text:p>
          </table:table-cell>
          <table:table-cell table:style-name="ce11" office:value-type="float" office:value="165" calcext:value-type="float">
            <text:p>165</text:p>
          </table:table-cell>
          <table:table-cell table:formula="of:=CONCATENATE(&quot;2nd1-&quot;;TEXT([.D427];&quot;0&quot;))" office:value-type="string" office:string-value="2nd1-36" calcext:value-type="string">
            <text:p>2nd1-36</text:p>
          </table:table-cell>
          <table:table-cell office:value-type="float" office:value="36" calcext:value-type="float">
            <text:p>36</text:p>
          </table:table-cell>
          <table:table-cell office:value-type="string" calcext:value-type="string">
            <text:p>佐久間象山</text:p>
          </table:table-cell>
          <table:table-cell table:style-name="ce11" table:formula="of:=[.E427]" office:value-type="string" office:string-value="佐久間象山" calcext:value-type="string">
            <text:p>佐久間象山</text:p>
          </table:table-cell>
          <table:table-cell office:value-type="string" calcext:value-type="string">
            <text:p>さくましょうざん</text:p>
          </table:table-cell>
          <table:table-cell table:style-name="ce11" office:value-type="string" calcext:value-type="string">
            <text:p>第５弾ブースターパック</text:p>
          </table:table-cell>
          <table:table-cell table:style-name="ce11" table:formula="of:=VLOOKUP([.H427];[$収録番号.$A$1:$収録番号.$B$10];2;0)" office:value-type="float" office:value="55" calcext:value-type="float">
            <text:p>55</text:p>
          </table:table-cell>
          <table:table-cell office:value-type="string" calcext:value-type="string">
            <text:p>N</text:p>
          </table:table-cell>
          <table:table-cell table:style-name="ce11" table:formula="of:=VLOOKUP([.J427];[$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27];[$種類番号.$A$1:$種類番号.$B$4];2;0)" office:value-type="float" office:value="1" calcext:value-type="float">
            <text:p>1</text:p>
          </table:table-cell>
          <table:table-cell office:value-type="string" calcext:value-type="string">
            <text:p>緑</text:p>
          </table:table-cell>
          <table:table-cell table:style-name="ce11" table:formula="of:=VLOOKUP([.N427];[$色番号.$A$1:$色番号.$B$10];2;0)" office:value-type="float" office:value="4" calcext:value-type="float">
            <text:p>4</text:p>
          </table:table-cell>
          <table:table-cell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2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27];[$特性番号.$A$1:$特性番号.$B$8];2;0);0)" office:value-type="float" office:value="0" calcext:value-type="float">
            <text:p>0</text:p>
          </table:table-cell>
          <table:table-cell office:value-type="string" calcext:value-type="string">
            <text:p>この能力は、相手の魔力ゾーンに裏のカードがあるなら、戦場で効果を発揮する。これは「ダブルプレッシャー」を得る。</text:p>
          </table:table-cell>
          <table:table-cell office:value-type="float" office:value="4000" calcext:value-type="float">
            <text:p>4000</text:p>
          </table:table-cell>
          <table:table-cell office:value-type="string" calcext:value-type="string">
            <text:p>1ドローする</text:p>
          </table:table-cell>
          <table:table-cell table:style-name="ce11" table:formula="of:=IFERROR(VLOOKUP([.$X427];[$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36.png</text:p>
          </table:table-cell>
          <table:table-cell table:style-name="ce11" table:formula="of:=CONCATENATE([$JSON.$A$1];[.$C427];[$JSON.$B$1];[.$E427];[$JSON.$C$1];[.F427];[$JSON.$D$1];[.$G427];[$JSON.$E$1];IF(ISNA([.$T427]);&quot;null&quot;;&quot;&quot;&quot;&quot;&amp;[.$T427]&amp;&quot;&quot;&quot;&quot;);[$JSON.$F$1];[.$V427];[$JSON.$G$1];IF(ISNA([.$X427]);&quot;null&quot;;&quot;&quot;&quot;&quot;&amp;[.$X427]&amp;&quot;&quot;&quot;&quot;);[$JSON.$H$1];[.$AA427];[$JSON.$I$1];[.$I427];[$JSON.$J$1];[.K427];[$JSON.$K$1];[.$M427];[$JSON.$L$1];[.$P427];[$JSON.$M$1];[.$O427];[$JSON.$N$1];[.$S427];[$JSON.$O$1];[.$U427];[$JSON.$P$1];IF(ISNA([.$W427]);&quot;null&quot;;[.$W427]);[$JSON.$Q$1];[.$Y427];[$JSON.$R$1];IF([.$Z427];&quot;true&quot;;&quot;false&quot;);[$JSON.$S$1];[.$A427];[$JSON.$T$1];[.$B427];[$JSON.$U$1])" office:value-type="string" office:string-value="{&quot;id&quot;:&quot;2nd1-36&quot;,&quot;name&quot;:&quot;佐久間象山&quot;,&quot;displayName&quot;:&quot;佐久間象山&quot;,&quot;kana&quot;:&quot;さくましょうざん&quot;,&quot;traitText&quot;:null,&quot;ruleText&quot;:&quot;この能力は、相手の魔力ゾーンに裏のカードがあるなら、戦場で効果を発揮する。これは「ダブルプレッシャー」を得る。&quot;,&quot;legacyText&quot;:&quot;1ドローする&quot;,&quot;imageUrl&quot;:&quot;https://one-draw.jp/ijinden/cardlist/005/card/05_036.png&quot;,&quot;expansion&quot;:55,&quot;rarity&quot;:1,&quot;type&quot;:1,&quot;level&quot;:4,&quot;color&quot;:4,&quot;term&quot;:0,&quot;trait&quot;:0,&quot;power&quot;:4000,&quot;legacy&quot;:4,&quot;anyNumCopies&quot;:false,&quot;orderTable&quot;:426,&quot;orderDeck&quot;:165}," calcext:value-type="string">
            <text:p>{"id":"2nd1-36","name":"佐久間象山","displayName":"佐久間象山","kana":"さくましょうざん","traitText":null,"ruleText":"この能力は、相手の魔力ゾーンに裏のカードがあるなら、戦場で効果を発揮する。これは「ダブルプレッシャー」を得る。","legacyText":"1ドローする","imageUrl":"https://one-draw.jp/ijinden/cardlist/005/card/05_036.png","expansion":55,"rarity":1,"type":1,"level":4,"color":4,"term":0,"trait":0,"power":4000,"legacy":4,"anyNumCopies":false,"orderTable":426,"orderDeck":165},</text:p>
          </table:table-cell>
          <table:table-cell table:number-columns-repeated="16356"/>
        </table:table-row>
        <table:table-row table:style-name="ro2">
          <table:table-cell table:style-name="ce11" office:value-type="float" office:value="427" calcext:value-type="float">
            <text:p>427</text:p>
          </table:table-cell>
          <table:table-cell table:style-name="ce11" office:value-type="float" office:value="247" calcext:value-type="float">
            <text:p>247</text:p>
          </table:table-cell>
          <table:table-cell table:formula="of:=CONCATENATE(&quot;2nd1-&quot;;TEXT([.D428];&quot;0&quot;))" office:value-type="string" office:string-value="2nd1-37" calcext:value-type="string">
            <text:p>2nd1-37</text:p>
          </table:table-cell>
          <table:table-cell office:value-type="float" office:value="37" calcext:value-type="float">
            <text:p>37</text:p>
          </table:table-cell>
          <table:table-cell office:value-type="string" calcext:value-type="string">
            <text:p>伊藤博文</text:p>
          </table:table-cell>
          <table:table-cell table:style-name="ce11" table:formula="of:=[.E428]" office:value-type="string" office:string-value="伊藤博文" calcext:value-type="string">
            <text:p>伊藤博文</text:p>
          </table:table-cell>
          <table:table-cell office:value-type="string" calcext:value-type="string">
            <text:p>いとうひろぶみ</text:p>
          </table:table-cell>
          <table:table-cell table:style-name="ce11" office:value-type="string" calcext:value-type="string">
            <text:p>第５弾ブースターパック</text:p>
          </table:table-cell>
          <table:table-cell table:style-name="ce11" table:formula="of:=VLOOKUP([.H428];[$収録番号.$A$1:$収録番号.$B$10];2;0)" office:value-type="float" office:value="55" calcext:value-type="float">
            <text:p>55</text:p>
          </table:table-cell>
          <table:table-cell office:value-type="string" calcext:value-type="string">
            <text:p>N</text:p>
          </table:table-cell>
          <table:table-cell table:style-name="ce11" table:formula="of:=VLOOKUP([.J428];[$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28];[$種類番号.$A$1:$種類番号.$B$4];2;0)" office:value-type="float" office:value="1" calcext:value-type="float">
            <text:p>1</text:p>
          </table:table-cell>
          <table:table-cell office:value-type="string" calcext:value-type="string">
            <text:p>緑</text:p>
          </table:table-cell>
          <table:table-cell table:style-name="ce11" table:formula="of:=VLOOKUP([.N428];[$色番号.$A$1:$色番号.$B$10];2;0)" office:value-type="float" office:value="4" calcext:value-type="float">
            <text:p>4</text:p>
          </table:table-cell>
          <table:table-cell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2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28];[$特性番号.$A$1:$特性番号.$B$8];2;0);0)" office:value-type="float" office:value="0" calcext:value-type="float">
            <text:p>0</text:p>
          </table:table-cell>
          <table:table-cell office:value-type="string" calcext:value-type="string">
            <text:p>この能力は、これが戦場に置かれたとき、相手の戦場のイジン1体かハイケイ1つを指定して発動できる。そのイジンかハイケイを裏にして魔力ゾーンに置いて、イジン召喚権+1する。</text:p>
          </table:table-cell>
          <table:table-cell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428];[$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37.png</text:p>
          </table:table-cell>
          <table:table-cell table:style-name="ce11" table:formula="of:=CONCATENATE([$JSON.$A$1];[.$C428];[$JSON.$B$1];[.$E428];[$JSON.$C$1];[.F428];[$JSON.$D$1];[.$G428];[$JSON.$E$1];IF(ISNA([.$T428]);&quot;null&quot;;&quot;&quot;&quot;&quot;&amp;[.$T428]&amp;&quot;&quot;&quot;&quot;);[$JSON.$F$1];[.$V428];[$JSON.$G$1];IF(ISNA([.$X428]);&quot;null&quot;;&quot;&quot;&quot;&quot;&amp;[.$X428]&amp;&quot;&quot;&quot;&quot;);[$JSON.$H$1];[.$AA428];[$JSON.$I$1];[.$I428];[$JSON.$J$1];[.K428];[$JSON.$K$1];[.$M428];[$JSON.$L$1];[.$P428];[$JSON.$M$1];[.$O428];[$JSON.$N$1];[.$S428];[$JSON.$O$1];[.$U428];[$JSON.$P$1];IF(ISNA([.$W428]);&quot;null&quot;;[.$W428]);[$JSON.$Q$1];[.$Y428];[$JSON.$R$1];IF([.$Z428];&quot;true&quot;;&quot;false&quot;);[$JSON.$S$1];[.$A428];[$JSON.$T$1];[.$B428];[$JSON.$U$1])" office:value-type="string" office:string-value="{&quot;id&quot;:&quot;2nd1-37&quot;,&quot;name&quot;:&quot;伊藤博文&quot;,&quot;displayName&quot;:&quot;伊藤博文&quot;,&quot;kana&quot;:&quot;いとうひろぶみ&quot;,&quot;traitText&quot;:null,&quot;ruleText&quot;:&quot;この能力は、これが戦場に置かれたとき、相手の戦場のイジン1体かハイケイ1つを指定して発動できる。そのイジンかハイケイを裏にして魔力ゾーンに置いて、イジン召喚権+1する。&quot;,&quot;legacyText&quot;:null,&quot;imageUrl&quot;:&quot;https://one-draw.jp/ijinden/cardlist/005/card/05_037.png&quot;,&quot;expansion&quot;:55,&quot;rarity&quot;:1,&quot;type&quot;:1,&quot;level&quot;:6,&quot;color&quot;:4,&quot;term&quot;:0,&quot;trait&quot;:0,&quot;power&quot;:5000,&quot;legacy&quot;:0,&quot;anyNumCopies&quot;:false,&quot;orderTable&quot;:427,&quot;orderDeck&quot;:247}," calcext:value-type="string">
            <text:p>{"id":"2nd1-37","name":"伊藤博文","displayName":"伊藤博文","kana":"いとうひろぶみ","traitText":null,"ruleText":"この能力は、これが戦場に置かれたとき、相手の戦場のイジン1体かハイケイ1つを指定して発動できる。そのイジンかハイケイを裏にして魔力ゾーンに置いて、イジン召喚権+1する。","legacyText":null,"imageUrl":"https://one-draw.jp/ijinden/cardlist/005/card/05_037.png","expansion":55,"rarity":1,"type":1,"level":6,"color":4,"term":0,"trait":0,"power":5000,"legacy":0,"anyNumCopies":false,"orderTable":427,"orderDeck":247},</text:p>
          </table:table-cell>
          <table:table-cell table:number-columns-repeated="16356"/>
        </table:table-row>
        <table:table-row table:style-name="ro2">
          <table:table-cell table:style-name="ce11" office:value-type="float" office:value="428" calcext:value-type="float">
            <text:p>428</text:p>
          </table:table-cell>
          <table:table-cell table:style-name="ce11" office:value-type="float" office:value="65" calcext:value-type="float">
            <text:p>65</text:p>
          </table:table-cell>
          <table:table-cell table:formula="of:=CONCATENATE(&quot;2nd1-&quot;;TEXT([.D429];&quot;0&quot;))" office:value-type="string" office:string-value="2nd1-38" calcext:value-type="string">
            <text:p>2nd1-38</text:p>
          </table:table-cell>
          <table:table-cell office:value-type="float" office:value="38" calcext:value-type="float">
            <text:p>38</text:p>
          </table:table-cell>
          <table:table-cell office:value-type="string" calcext:value-type="string">
            <text:p>小林虎三郎</text:p>
          </table:table-cell>
          <table:table-cell table:style-name="ce11" table:formula="of:=[.E429]" office:value-type="string" office:string-value="小林虎三郎" calcext:value-type="string">
            <text:p>小林虎三郎</text:p>
          </table:table-cell>
          <table:table-cell office:value-type="string" calcext:value-type="string">
            <text:p>こばやしとらさぶろう</text:p>
          </table:table-cell>
          <table:table-cell table:style-name="ce11" office:value-type="string" calcext:value-type="string">
            <text:p>第５弾ブースターパック</text:p>
          </table:table-cell>
          <table:table-cell table:style-name="ce11" table:formula="of:=VLOOKUP([.H429];[$収録番号.$A$1:$収録番号.$B$10];2;0)" office:value-type="float" office:value="55" calcext:value-type="float">
            <text:p>55</text:p>
          </table:table-cell>
          <table:table-cell office:value-type="string" calcext:value-type="string">
            <text:p>R</text:p>
          </table:table-cell>
          <table:table-cell table:style-name="ce11" table:formula="of:=VLOOKUP([.J429];[$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29];[$種類番号.$A$1:$種類番号.$B$4];2;0)" office:value-type="float" office:value="1" calcext:value-type="float">
            <text:p>1</text:p>
          </table:table-cell>
          <table:table-cell office:value-type="string" calcext:value-type="string">
            <text:p>緑</text:p>
          </table:table-cell>
          <table:table-cell table:style-name="ce11" table:formula="of:=VLOOKUP([.N429];[$色番号.$A$1:$色番号.$B$10];2;0)" office:value-type="float" office:value="4" calcext:value-type="float">
            <text:p>4</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2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29];[$特性番号.$A$1:$特性番号.$B$8];2;0);0)" office:value-type="float" office:value="0" calcext:value-type="float">
            <text:p>0</text:p>
          </table:table-cell>
          <table:table-cell office:value-type="string" calcext:value-type="string">
            <text:p>この能力は、相手の魔力ゾーンに裏のカードがあるなら、戦場で効果を発揮する。相手の戦場の起きているイジンは、能力すべてを失う。この能力は、能力によって失われない。</text:p>
          </table:table-cell>
          <table:table-cell office:value-type="float" office:value="2000" calcext:value-type="float">
            <text:p>2000</text:p>
          </table:table-cell>
          <table:table-cell office:value-type="string" calcext:value-type="string">
            <text:p>魔力化</text:p>
          </table:table-cell>
          <table:table-cell table:style-name="ce11" table:formula="of:=IFERROR(VLOOKUP([.$X429];[$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38.png</text:p>
          </table:table-cell>
          <table:table-cell table:style-name="ce11" table:formula="of:=CONCATENATE([$JSON.$A$1];[.$C429];[$JSON.$B$1];[.$E429];[$JSON.$C$1];[.F429];[$JSON.$D$1];[.$G429];[$JSON.$E$1];IF(ISNA([.$T429]);&quot;null&quot;;&quot;&quot;&quot;&quot;&amp;[.$T429]&amp;&quot;&quot;&quot;&quot;);[$JSON.$F$1];[.$V429];[$JSON.$G$1];IF(ISNA([.$X429]);&quot;null&quot;;&quot;&quot;&quot;&quot;&amp;[.$X429]&amp;&quot;&quot;&quot;&quot;);[$JSON.$H$1];[.$AA429];[$JSON.$I$1];[.$I429];[$JSON.$J$1];[.K429];[$JSON.$K$1];[.$M429];[$JSON.$L$1];[.$P429];[$JSON.$M$1];[.$O429];[$JSON.$N$1];[.$S429];[$JSON.$O$1];[.$U429];[$JSON.$P$1];IF(ISNA([.$W429]);&quot;null&quot;;[.$W429]);[$JSON.$Q$1];[.$Y429];[$JSON.$R$1];IF([.$Z429];&quot;true&quot;;&quot;false&quot;);[$JSON.$S$1];[.$A429];[$JSON.$T$1];[.$B429];[$JSON.$U$1])" office:value-type="string" office:string-value="{&quot;id&quot;:&quot;2nd1-38&quot;,&quot;name&quot;:&quot;小林虎三郎&quot;,&quot;displayName&quot;:&quot;小林虎三郎&quot;,&quot;kana&quot;:&quot;こばやしとらさぶろう&quot;,&quot;traitText&quot;:null,&quot;ruleText&quot;:&quot;この能力は、相手の魔力ゾーンに裏のカードがあるなら、戦場で効果を発揮する。相手の戦場の起きているイジンは、能力すべてを失う。この能力は、能力によって失われない。&quot;,&quot;legacyText&quot;:&quot;魔力化&quot;,&quot;imageUrl&quot;:&quot;https://one-draw.jp/ijinden/cardlist/005/card/05_038.png&quot;,&quot;expansion&quot;:55,&quot;rarity&quot;:2,&quot;type&quot;:1,&quot;level&quot;:2,&quot;color&quot;:4,&quot;term&quot;:0,&quot;trait&quot;:0,&quot;power&quot;:2000,&quot;legacy&quot;:1,&quot;anyNumCopies&quot;:false,&quot;orderTable&quot;:428,&quot;orderDeck&quot;:65}," calcext:value-type="string">
            <text:p>{"id":"2nd1-38","name":"小林虎三郎","displayName":"小林虎三郎","kana":"こばやしとらさぶろう","traitText":null,"ruleText":"この能力は、相手の魔力ゾーンに裏のカードがあるなら、戦場で効果を発揮する。相手の戦場の起きているイジンは、能力すべてを失う。この能力は、能力によって失われない。","legacyText":"魔力化","imageUrl":"https://one-draw.jp/ijinden/cardlist/005/card/05_038.png","expansion":55,"rarity":2,"type":1,"level":2,"color":4,"term":0,"trait":0,"power":2000,"legacy":1,"anyNumCopies":false,"orderTable":428,"orderDeck":65},</text:p>
          </table:table-cell>
          <table:table-cell table:number-columns-repeated="16356"/>
        </table:table-row>
        <table:table-row table:style-name="ro2">
          <table:table-cell table:style-name="ce11" office:value-type="float" office:value="429" calcext:value-type="float">
            <text:p>429</text:p>
          </table:table-cell>
          <table:table-cell table:style-name="ce11" office:value-type="float" office:value="284" calcext:value-type="float">
            <text:p>284</text:p>
          </table:table-cell>
          <table:table-cell table:formula="of:=CONCATENATE(&quot;2nd1-&quot;;TEXT([.D430];&quot;0&quot;))" office:value-type="string" office:string-value="2nd1-39" calcext:value-type="string">
            <text:p>2nd1-39</text:p>
          </table:table-cell>
          <table:table-cell office:value-type="float" office:value="39" calcext:value-type="float">
            <text:p>39</text:p>
          </table:table-cell>
          <table:table-cell office:value-type="string" calcext:value-type="string">
            <text:p>最澄</text:p>
          </table:table-cell>
          <table:table-cell office:value-type="string" calcext:value-type="string">
            <text:p>最澄 (第5弾)</text:p>
          </table:table-cell>
          <table:table-cell office:value-type="string" calcext:value-type="string">
            <text:p>さいちょう</text:p>
          </table:table-cell>
          <table:table-cell table:style-name="ce11" office:value-type="string" calcext:value-type="string">
            <text:p>第５弾ブースターパック</text:p>
          </table:table-cell>
          <table:table-cell table:style-name="ce11" table:formula="of:=VLOOKUP([.H430];[$収録番号.$A$1:$収録番号.$B$10];2;0)" office:value-type="float" office:value="55" calcext:value-type="float">
            <text:p>55</text:p>
          </table:table-cell>
          <table:table-cell office:value-type="string" calcext:value-type="string">
            <text:p>N</text:p>
          </table:table-cell>
          <table:table-cell table:style-name="ce11" table:formula="of:=VLOOKUP([.J430];[$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30];[$種類番号.$A$1:$種類番号.$B$4];2;0)" office:value-type="float" office:value="1" calcext:value-type="float">
            <text:p>1</text:p>
          </table:table-cell>
          <table:table-cell office:value-type="string" calcext:value-type="string">
            <text:p>緑</text:p>
          </table:table-cell>
          <table:table-cell table:style-name="ce11" table:formula="of:=VLOOKUP([.N430];[$色番号.$A$1:$色番号.$B$10];2;0)" office:value-type="float" office:value="4" calcext:value-type="float">
            <text:p>4</text:p>
          </table:table-cell>
          <table:table-cell office:value-type="float" office:value="8" calcext:value-type="float">
            <text:p>8</text:p>
          </table:table-cell>
          <table:table-cell table:style-name="ce11" table:formula="of:=NA()" office:value-type="string" office:string-value="" calcext:value-type="error">
            <text:p>#N/A</text:p>
          </table:table-cell>
          <table:table-cell office:value-type="string" calcext:value-type="string">
            <text:p>航海</text:p>
          </table:table-cell>
          <table:table-cell table:style-name="ce11" table:formula="of:=IFERROR(VLOOKUP([.$R430];[$能力語番号.$A$1:$能力語番号.$B$11];2;0);0)" office:value-type="float" office:value="1" calcext:value-type="float">
            <text:p>1</text:p>
          </table:table-cell>
          <table:table-cell table:formula="of:=NA()" office:value-type="string" office:string-value="" calcext:value-type="error">
            <text:p>#N/A</text:p>
          </table:table-cell>
          <table:table-cell table:style-name="ce11" table:formula="of:=IFERROR(VLOOKUP([.$T430];[$特性番号.$A$1:$特性番号.$B$8];2;0);0)" office:value-type="float" office:value="0" calcext:value-type="float">
            <text:p>0</text:p>
          </table:table-cell>
          <table:table-cell office:value-type="string" calcext:value-type="string">
            <text:p>航海 - この能力は、これがアタッカーになったとき、自分の戦場のハイケイ1つを手札に戻して発動できる。自分の戦場のイジンすべては、このターンに限り「ダブルプレッシャー」を得る。</text:p>
          </table:table-cell>
          <table:table-cell office:value-type="float" office:value="7000" calcext:value-type="float">
            <text:p>7000</text:p>
          </table:table-cell>
          <table:table-cell office:value-type="string" calcext:value-type="string">
            <text:p>魔力化</text:p>
          </table:table-cell>
          <table:table-cell table:style-name="ce11" table:formula="of:=IFERROR(VLOOKUP([.$X430];[$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39.png</text:p>
          </table:table-cell>
          <table:table-cell table:style-name="ce11" table:formula="of:=CONCATENATE([$JSON.$A$1];[.$C430];[$JSON.$B$1];[.$E430];[$JSON.$C$1];[.F430];[$JSON.$D$1];[.$G430];[$JSON.$E$1];IF(ISNA([.$T430]);&quot;null&quot;;&quot;&quot;&quot;&quot;&amp;[.$T430]&amp;&quot;&quot;&quot;&quot;);[$JSON.$F$1];[.$V430];[$JSON.$G$1];IF(ISNA([.$X430]);&quot;null&quot;;&quot;&quot;&quot;&quot;&amp;[.$X430]&amp;&quot;&quot;&quot;&quot;);[$JSON.$H$1];[.$AA430];[$JSON.$I$1];[.$I430];[$JSON.$J$1];[.K430];[$JSON.$K$1];[.$M430];[$JSON.$L$1];[.$P430];[$JSON.$M$1];[.$O430];[$JSON.$N$1];[.$S430];[$JSON.$O$1];[.$U430];[$JSON.$P$1];IF(ISNA([.$W430]);&quot;null&quot;;[.$W430]);[$JSON.$Q$1];[.$Y430];[$JSON.$R$1];IF([.$Z430];&quot;true&quot;;&quot;false&quot;);[$JSON.$S$1];[.$A430];[$JSON.$T$1];[.$B430];[$JSON.$U$1])" office:value-type="string" office:string-value="{&quot;id&quot;:&quot;2nd1-39&quot;,&quot;name&quot;:&quot;最澄&quot;,&quot;displayName&quot;:&quot;最澄 (第5弾)&quot;,&quot;kana&quot;:&quot;さいちょう&quot;,&quot;traitText&quot;:null,&quot;ruleText&quot;:&quot;航海 - この能力は、これがアタッカーになったとき、自分の戦場のハイケイ1つを手札に戻して発動できる。自分の戦場のイジンすべては、このターンに限り「ダブルプレッシャー」を得る。&quot;,&quot;legacyText&quot;:&quot;魔力化&quot;,&quot;imageUrl&quot;:&quot;https://one-draw.jp/ijinden/cardlist/005/card/05_039.png&quot;,&quot;expansion&quot;:55,&quot;rarity&quot;:1,&quot;type&quot;:1,&quot;level&quot;:8,&quot;color&quot;:4,&quot;term&quot;:1,&quot;trait&quot;:0,&quot;power&quot;:7000,&quot;legacy&quot;:1,&quot;anyNumCopies&quot;:false,&quot;orderTable&quot;:429,&quot;orderDeck&quot;:284}," calcext:value-type="string">
            <text:p>{"id":"2nd1-39","name":"最澄","displayName":"最澄 (第5弾)","kana":"さいちょう","traitText":null,"ruleText":"航海 - この能力は、これがアタッカーになったとき、自分の戦場のハイケイ1つを手札に戻して発動できる。自分の戦場のイジンすべては、このターンに限り「ダブルプレッシャー」を得る。","legacyText":"魔力化","imageUrl":"https://one-draw.jp/ijinden/cardlist/005/card/05_039.png","expansion":55,"rarity":1,"type":1,"level":8,"color":4,"term":1,"trait":0,"power":7000,"legacy":1,"anyNumCopies":false,"orderTable":429,"orderDeck":284},</text:p>
          </table:table-cell>
          <table:table-cell table:number-columns-repeated="16356"/>
        </table:table-row>
        <table:table-row table:style-name="ro2">
          <table:table-cell table:style-name="ce11" office:value-type="float" office:value="430" calcext:value-type="float">
            <text:p>430</text:p>
          </table:table-cell>
          <table:table-cell table:style-name="ce11" office:value-type="float" office:value="118" calcext:value-type="float">
            <text:p>118</text:p>
          </table:table-cell>
          <table:table-cell table:formula="of:=CONCATENATE(&quot;2nd1-&quot;;TEXT([.D431];&quot;0&quot;))" office:value-type="string" office:string-value="2nd1-40" calcext:value-type="string">
            <text:p>2nd1-40</text:p>
          </table:table-cell>
          <table:table-cell office:value-type="float" office:value="40" calcext:value-type="float">
            <text:p>40</text:p>
          </table:table-cell>
          <table:table-cell office:value-type="string" calcext:value-type="string">
            <text:p>ホンタイジ</text:p>
          </table:table-cell>
          <table:table-cell table:style-name="ce11" table:formula="of:=[.E431]" office:value-type="string" office:string-value="ホンタイジ" calcext:value-type="string">
            <text:p>ホンタイジ</text:p>
          </table:table-cell>
          <table:table-cell office:value-type="string" calcext:value-type="string">
            <text:p>ほんたいじ</text:p>
          </table:table-cell>
          <table:table-cell table:style-name="ce11" office:value-type="string" calcext:value-type="string">
            <text:p>第５弾ブースターパック</text:p>
          </table:table-cell>
          <table:table-cell table:style-name="ce11" table:formula="of:=VLOOKUP([.H431];[$収録番号.$A$1:$収録番号.$B$10];2;0)" office:value-type="float" office:value="55" calcext:value-type="float">
            <text:p>55</text:p>
          </table:table-cell>
          <table:table-cell office:value-type="string" calcext:value-type="string">
            <text:p>N</text:p>
          </table:table-cell>
          <table:table-cell table:style-name="ce11" table:formula="of:=VLOOKUP([.J431];[$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31];[$種類番号.$A$1:$種類番号.$B$4];2;0)" office:value-type="float" office:value="1" calcext:value-type="float">
            <text:p>1</text:p>
          </table:table-cell>
          <table:table-cell office:value-type="string" calcext:value-type="string">
            <text:p>緑</text:p>
          </table:table-cell>
          <table:table-cell table:style-name="ce11" table:formula="of:=VLOOKUP([.N431];[$色番号.$A$1:$色番号.$B$10];2;0)" office:value-type="float" office:value="4" calcext:value-type="float">
            <text:p>4</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31];[$特性番号.$A$1:$特性番号.$B$8];2;0);0)" office:value-type="float" office:value="0" calcext:value-type="float">
            <text:p>0</text:p>
          </table:table-cell>
          <table:table-cell/>
          <table:table-cell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431];[$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40.png</text:p>
          </table:table-cell>
          <table:table-cell table:style-name="ce11" table:formula="of:=CONCATENATE([$JSON.$A$1];[.$C431];[$JSON.$B$1];[.$E431];[$JSON.$C$1];[.F431];[$JSON.$D$1];[.$G431];[$JSON.$E$1];IF(ISNA([.$T431]);&quot;null&quot;;&quot;&quot;&quot;&quot;&amp;[.$T431]&amp;&quot;&quot;&quot;&quot;);[$JSON.$F$1];[.$V431];[$JSON.$G$1];IF(ISNA([.$X431]);&quot;null&quot;;&quot;&quot;&quot;&quot;&amp;[.$X431]&amp;&quot;&quot;&quot;&quot;);[$JSON.$H$1];[.$AA431];[$JSON.$I$1];[.$I431];[$JSON.$J$1];[.K431];[$JSON.$K$1];[.$M431];[$JSON.$L$1];[.$P431];[$JSON.$M$1];[.$O431];[$JSON.$N$1];[.$S431];[$JSON.$O$1];[.$U431];[$JSON.$P$1];IF(ISNA([.$W431]);&quot;null&quot;;[.$W431]);[$JSON.$Q$1];[.$Y431];[$JSON.$R$1];IF([.$Z431];&quot;true&quot;;&quot;false&quot;);[$JSON.$S$1];[.$A431];[$JSON.$T$1];[.$B431];[$JSON.$U$1])" office:value-type="string" office:string-value="{&quot;id&quot;:&quot;2nd1-40&quot;,&quot;name&quot;:&quot;ホンタイジ&quot;,&quot;displayName&quot;:&quot;ホンタイジ&quot;,&quot;kana&quot;:&quot;ほんたいじ&quot;,&quot;traitText&quot;:null,&quot;ruleText&quot;:&quot;&quot;,&quot;legacyText&quot;:null,&quot;imageUrl&quot;:&quot;https://one-draw.jp/ijinden/cardlist/005/card/05_040.png&quot;,&quot;expansion&quot;:55,&quot;rarity&quot;:1,&quot;type&quot;:1,&quot;level&quot;:3,&quot;color&quot;:4,&quot;term&quot;:0,&quot;trait&quot;:0,&quot;power&quot;:5000,&quot;legacy&quot;:0,&quot;anyNumCopies&quot;:false,&quot;orderTable&quot;:430,&quot;orderDeck&quot;:118}," calcext:value-type="string">
            <text:p>{"id":"2nd1-40","name":"ホンタイジ","displayName":"ホンタイジ","kana":"ほんたいじ","traitText":null,"ruleText":"","legacyText":null,"imageUrl":"https://one-draw.jp/ijinden/cardlist/005/card/05_040.png","expansion":55,"rarity":1,"type":1,"level":3,"color":4,"term":0,"trait":0,"power":5000,"legacy":0,"anyNumCopies":false,"orderTable":430,"orderDeck":118},</text:p>
          </table:table-cell>
          <table:table-cell table:number-columns-repeated="16356"/>
        </table:table-row>
        <table:table-row table:style-name="ro2">
          <table:table-cell table:style-name="ce11" office:value-type="float" office:value="431" calcext:value-type="float">
            <text:p>431</text:p>
          </table:table-cell>
          <table:table-cell table:style-name="ce11" office:value-type="float" office:value="72" calcext:value-type="float">
            <text:p>72</text:p>
          </table:table-cell>
          <table:table-cell table:formula="of:=CONCATENATE(&quot;2nd1-&quot;;TEXT([.D432];&quot;0&quot;))" office:value-type="string" office:string-value="2nd1-41" calcext:value-type="string">
            <text:p>2nd1-41</text:p>
          </table:table-cell>
          <table:table-cell office:value-type="float" office:value="41" calcext:value-type="float">
            <text:p>41</text:p>
          </table:table-cell>
          <table:table-cell office:value-type="string" calcext:value-type="string">
            <text:p>今川義元</text:p>
          </table:table-cell>
          <table:table-cell office:value-type="string" calcext:value-type="string">
            <text:p>今川義元 (第5弾)</text:p>
          </table:table-cell>
          <table:table-cell office:value-type="string" calcext:value-type="string">
            <text:p>いまがわよしもと</text:p>
          </table:table-cell>
          <table:table-cell table:style-name="ce11" office:value-type="string" calcext:value-type="string">
            <text:p>第５弾ブースターパック</text:p>
          </table:table-cell>
          <table:table-cell table:style-name="ce11" table:formula="of:=VLOOKUP([.H432];[$収録番号.$A$1:$収録番号.$B$10];2;0)" office:value-type="float" office:value="55" calcext:value-type="float">
            <text:p>55</text:p>
          </table:table-cell>
          <table:table-cell office:value-type="string" calcext:value-type="string">
            <text:p>N</text:p>
          </table:table-cell>
          <table:table-cell table:style-name="ce11" table:formula="of:=VLOOKUP([.J432];[$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32];[$種類番号.$A$1:$種類番号.$B$4];2;0)" office:value-type="float" office:value="1" calcext:value-type="float">
            <text:p>1</text:p>
          </table:table-cell>
          <table:table-cell office:value-type="string" calcext:value-type="string">
            <text:p>黄</text:p>
          </table:table-cell>
          <table:table-cell table:style-name="ce11" table:formula="of:=VLOOKUP([.N432];[$色番号.$A$1:$色番号.$B$10];2;0)" office:value-type="float" office:value="8" calcext:value-type="float">
            <text:p>8</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2];[$能力語番号.$A$1:$能力語番号.$B$11];2;0);0)" office:value-type="float" office:value="0" calcext:value-type="float">
            <text:p>0</text:p>
          </table:table-cell>
          <table:table-cell office:value-type="string" calcext:value-type="string">
            <text:p>剣術</text:p>
          </table:table-cell>
          <table:table-cell table:style-name="ce11" table:formula="of:=IFERROR(VLOOKUP([.$T432];[$特性番号.$A$1:$特性番号.$B$8];2;0);0)" office:value-type="float" office:value="1" calcext:value-type="float">
            <text:p>1</text:p>
          </table:table-cell>
          <table:table-cell office:value-type="string" calcext:value-type="string">
            <text:p>この能力は、これが破壊されたときに発動できる。自分か相手の戦場のハイケイ1つを破壊する。¶ウォッチャー¶アタック+500</text:p>
          </table:table-cell>
          <table:table-cell office:value-type="float" office:value="1000" calcext:value-type="float">
            <text:p>1000</text:p>
          </table:table-cell>
          <table:table-cell office:value-type="string" calcext:value-type="string">
            <text:p>1ドローする</text:p>
          </table:table-cell>
          <table:table-cell table:style-name="ce11" table:formula="of:=IFERROR(VLOOKUP([.$X432];[$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41.png</text:p>
          </table:table-cell>
          <table:table-cell table:style-name="ce11" table:formula="of:=CONCATENATE([$JSON.$A$1];[.$C432];[$JSON.$B$1];[.$E432];[$JSON.$C$1];[.F432];[$JSON.$D$1];[.$G432];[$JSON.$E$1];IF(ISNA([.$T432]);&quot;null&quot;;&quot;&quot;&quot;&quot;&amp;[.$T432]&amp;&quot;&quot;&quot;&quot;);[$JSON.$F$1];[.$V432];[$JSON.$G$1];IF(ISNA([.$X432]);&quot;null&quot;;&quot;&quot;&quot;&quot;&amp;[.$X432]&amp;&quot;&quot;&quot;&quot;);[$JSON.$H$1];[.$AA432];[$JSON.$I$1];[.$I432];[$JSON.$J$1];[.K432];[$JSON.$K$1];[.$M432];[$JSON.$L$1];[.$P432];[$JSON.$M$1];[.$O432];[$JSON.$N$1];[.$S432];[$JSON.$O$1];[.$U432];[$JSON.$P$1];IF(ISNA([.$W432]);&quot;null&quot;;[.$W432]);[$JSON.$Q$1];[.$Y432];[$JSON.$R$1];IF([.$Z432];&quot;true&quot;;&quot;false&quot;);[$JSON.$S$1];[.$A432];[$JSON.$T$1];[.$B432];[$JSON.$U$1])" office:value-type="string" office:string-value="{&quot;id&quot;:&quot;2nd1-41&quot;,&quot;name&quot;:&quot;今川義元&quot;,&quot;displayName&quot;:&quot;今川義元 (第5弾)&quot;,&quot;kana&quot;:&quot;いまがわよしもと&quot;,&quot;traitText&quot;:&quot;剣術&quot;,&quot;ruleText&quot;:&quot;この能力は、これが破壊されたときに発動できる。自分か相手の戦場のハイケイ1つを破壊する。¶ウォッチャー¶アタック+500&quot;,&quot;legacyText&quot;:&quot;1ドローする&quot;,&quot;imageUrl&quot;:&quot;https://one-draw.jp/ijinden/cardlist/005/card/05_041.png&quot;,&quot;expansion&quot;:55,&quot;rarity&quot;:1,&quot;type&quot;:1,&quot;level&quot;:2,&quot;color&quot;:8,&quot;term&quot;:0,&quot;trait&quot;:1,&quot;power&quot;:1000,&quot;legacy&quot;:4,&quot;anyNumCopies&quot;:false,&quot;orderTable&quot;:431,&quot;orderDeck&quot;:72}," calcext:value-type="string">
            <text:p>{"id":"2nd1-41","name":"今川義元","displayName":"今川義元 (第5弾)","kana":"いまがわよしもと","traitText":"剣術","ruleText":"この能力は、これが破壊されたときに発動できる。自分か相手の戦場のハイケイ1つを破壊する。¶ウォッチャー¶アタック+500","legacyText":"1ドローする","imageUrl":"https://one-draw.jp/ijinden/cardlist/005/card/05_041.png","expansion":55,"rarity":1,"type":1,"level":2,"color":8,"term":0,"trait":1,"power":1000,"legacy":4,"anyNumCopies":false,"orderTable":431,"orderDeck":72},</text:p>
          </table:table-cell>
          <table:table-cell table:number-columns-repeated="16356"/>
        </table:table-row>
        <table:table-row table:style-name="ro2">
          <table:table-cell table:style-name="ce11" office:value-type="float" office:value="432" calcext:value-type="float">
            <text:p>432</text:p>
          </table:table-cell>
          <table:table-cell table:style-name="ce11" office:value-type="float" office:value="24" calcext:value-type="float">
            <text:p>24</text:p>
          </table:table-cell>
          <table:table-cell table:formula="of:=CONCATENATE(&quot;2nd1-&quot;;TEXT([.D433];&quot;0&quot;))" office:value-type="string" office:string-value="2nd1-42" calcext:value-type="string">
            <text:p>2nd1-42</text:p>
          </table:table-cell>
          <table:table-cell office:value-type="float" office:value="42" calcext:value-type="float">
            <text:p>42</text:p>
          </table:table-cell>
          <table:table-cell office:value-type="string" calcext:value-type="string">
            <text:p>太原雪斎</text:p>
          </table:table-cell>
          <table:table-cell table:style-name="ce11" table:formula="of:=[.E433]" office:value-type="string" office:string-value="太原雪斎" calcext:value-type="string">
            <text:p>太原雪斎</text:p>
          </table:table-cell>
          <table:table-cell office:value-type="string" calcext:value-type="string">
            <text:p>たいげんせっさい</text:p>
          </table:table-cell>
          <table:table-cell table:style-name="ce11" office:value-type="string" calcext:value-type="string">
            <text:p>第５弾ブースターパック</text:p>
          </table:table-cell>
          <table:table-cell table:style-name="ce11" table:formula="of:=VLOOKUP([.H433];[$収録番号.$A$1:$収録番号.$B$10];2;0)" office:value-type="float" office:value="55" calcext:value-type="float">
            <text:p>55</text:p>
          </table:table-cell>
          <table:table-cell office:value-type="string" calcext:value-type="string">
            <text:p>N</text:p>
          </table:table-cell>
          <table:table-cell table:style-name="ce11" table:formula="of:=VLOOKUP([.J433];[$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33];[$種類番号.$A$1:$種類番号.$B$4];2;0)" office:value-type="float" office:value="1" calcext:value-type="float">
            <text:p>1</text:p>
          </table:table-cell>
          <table:table-cell office:value-type="string" calcext:value-type="string">
            <text:p>黄</text:p>
          </table:table-cell>
          <table:table-cell table:style-name="ce11" table:formula="of:=VLOOKUP([.N433];[$色番号.$A$1:$色番号.$B$10];2;0)" office:value-type="float" office:value="8" calcext:value-type="float">
            <text:p>8</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33];[$特性番号.$A$1:$特性番号.$B$8];2;0);0)" office:value-type="float" office:value="0" calcext:value-type="float">
            <text:p>0</text:p>
          </table:table-cell>
          <table:table-cell office:value-type="string" calcext:value-type="string">
            <text:p>この能力は戦場で効果を発揮する。自分と相手のマリョク配置権は、能力によって増えない。</text:p>
          </table:table-cell>
          <table:table-cell office:value-type="float" office:value="1000" calcext:value-type="float">
            <text:p>1000</text:p>
          </table:table-cell>
          <table:table-cell office:value-type="string" calcext:value-type="string">
            <text:p>1ドローする</text:p>
          </table:table-cell>
          <table:table-cell table:style-name="ce11" table:formula="of:=IFERROR(VLOOKUP([.$X433];[$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42.png</text:p>
          </table:table-cell>
          <table:table-cell table:style-name="ce11" table:formula="of:=CONCATENATE([$JSON.$A$1];[.$C433];[$JSON.$B$1];[.$E433];[$JSON.$C$1];[.F433];[$JSON.$D$1];[.$G433];[$JSON.$E$1];IF(ISNA([.$T433]);&quot;null&quot;;&quot;&quot;&quot;&quot;&amp;[.$T433]&amp;&quot;&quot;&quot;&quot;);[$JSON.$F$1];[.$V433];[$JSON.$G$1];IF(ISNA([.$X433]);&quot;null&quot;;&quot;&quot;&quot;&quot;&amp;[.$X433]&amp;&quot;&quot;&quot;&quot;);[$JSON.$H$1];[.$AA433];[$JSON.$I$1];[.$I433];[$JSON.$J$1];[.K433];[$JSON.$K$1];[.$M433];[$JSON.$L$1];[.$P433];[$JSON.$M$1];[.$O433];[$JSON.$N$1];[.$S433];[$JSON.$O$1];[.$U433];[$JSON.$P$1];IF(ISNA([.$W433]);&quot;null&quot;;[.$W433]);[$JSON.$Q$1];[.$Y433];[$JSON.$R$1];IF([.$Z433];&quot;true&quot;;&quot;false&quot;);[$JSON.$S$1];[.$A433];[$JSON.$T$1];[.$B433];[$JSON.$U$1])" office:value-type="string" office:string-value="{&quot;id&quot;:&quot;2nd1-42&quot;,&quot;name&quot;:&quot;太原雪斎&quot;,&quot;displayName&quot;:&quot;太原雪斎&quot;,&quot;kana&quot;:&quot;たいげんせっさい&quot;,&quot;traitText&quot;:null,&quot;ruleText&quot;:&quot;この能力は戦場で効果を発揮する。自分と相手のマリョク配置権は、能力によって増えない。&quot;,&quot;legacyText&quot;:&quot;1ドローする&quot;,&quot;imageUrl&quot;:&quot;https://one-draw.jp/ijinden/cardlist/005/card/05_042.png&quot;,&quot;expansion&quot;:55,&quot;rarity&quot;:1,&quot;type&quot;:1,&quot;level&quot;:1,&quot;color&quot;:8,&quot;term&quot;:0,&quot;trait&quot;:0,&quot;power&quot;:1000,&quot;legacy&quot;:4,&quot;anyNumCopies&quot;:false,&quot;orderTable&quot;:432,&quot;orderDeck&quot;:24}," calcext:value-type="string">
            <text:p>{"id":"2nd1-42","name":"太原雪斎","displayName":"太原雪斎","kana":"たいげんせっさい","traitText":null,"ruleText":"この能力は戦場で効果を発揮する。自分と相手のマリョク配置権は、能力によって増えない。","legacyText":"1ドローする","imageUrl":"https://one-draw.jp/ijinden/cardlist/005/card/05_042.png","expansion":55,"rarity":1,"type":1,"level":1,"color":8,"term":0,"trait":0,"power":1000,"legacy":4,"anyNumCopies":false,"orderTable":432,"orderDeck":24},</text:p>
          </table:table-cell>
          <table:table-cell table:number-columns-repeated="16356"/>
        </table:table-row>
        <table:table-row table:style-name="ro2">
          <table:table-cell table:style-name="ce11" office:value-type="float" office:value="433" calcext:value-type="float">
            <text:p>433</text:p>
          </table:table-cell>
          <table:table-cell table:style-name="ce11" office:value-type="float" office:value="73" calcext:value-type="float">
            <text:p>73</text:p>
          </table:table-cell>
          <table:table-cell table:formula="of:=CONCATENATE(&quot;2nd1-&quot;;TEXT([.D434];&quot;0&quot;))" office:value-type="string" office:string-value="2nd1-43" calcext:value-type="string">
            <text:p>2nd1-43</text:p>
          </table:table-cell>
          <table:table-cell office:value-type="float" office:value="43" calcext:value-type="float">
            <text:p>43</text:p>
          </table:table-cell>
          <table:table-cell office:value-type="string" calcext:value-type="string">
            <text:p>北条氏康</text:p>
          </table:table-cell>
          <table:table-cell table:style-name="ce11" table:formula="of:=[.E434]" office:value-type="string" office:string-value="北条氏康" calcext:value-type="string">
            <text:p>北条氏康</text:p>
          </table:table-cell>
          <table:table-cell office:value-type="string" calcext:value-type="string">
            <text:p>ほうじょううじやす</text:p>
          </table:table-cell>
          <table:table-cell table:style-name="ce11" office:value-type="string" calcext:value-type="string">
            <text:p>第５弾ブースターパック</text:p>
          </table:table-cell>
          <table:table-cell table:style-name="ce11" table:formula="of:=VLOOKUP([.H434];[$収録番号.$A$1:$収録番号.$B$10];2;0)" office:value-type="float" office:value="55" calcext:value-type="float">
            <text:p>55</text:p>
          </table:table-cell>
          <table:table-cell office:value-type="string" calcext:value-type="string">
            <text:p>N</text:p>
          </table:table-cell>
          <table:table-cell table:style-name="ce11" table:formula="of:=VLOOKUP([.J434];[$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34];[$種類番号.$A$1:$種類番号.$B$4];2;0)" office:value-type="float" office:value="1" calcext:value-type="float">
            <text:p>1</text:p>
          </table:table-cell>
          <table:table-cell office:value-type="string" calcext:value-type="string">
            <text:p>黄</text:p>
          </table:table-cell>
          <table:table-cell table:style-name="ce11" table:formula="of:=VLOOKUP([.N434];[$色番号.$A$1:$色番号.$B$10];2;0)" office:value-type="float" office:value="8" calcext:value-type="float">
            <text:p>8</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34];[$特性番号.$A$1:$特性番号.$B$8];2;0);0)" office:value-type="float" office:value="0" calcext:value-type="float">
            <text:p>0</text:p>
          </table:table-cell>
          <table:table-cell office:value-type="string" calcext:value-type="string">
            <text:p>この能力は、自分の戦場に他のイジンがいないなら、これが戦場に置かれたときに発動する。イジン召喚権+1する。</text:p>
          </table:table-cell>
          <table:table-cell office:value-type="float" office:value="1500" calcext:value-type="float">
            <text:p>1500</text:p>
          </table:table-cell>
          <table:table-cell office:value-type="string" calcext:value-type="string">
            <text:p>1ドローする</text:p>
          </table:table-cell>
          <table:table-cell table:style-name="ce11" table:formula="of:=IFERROR(VLOOKUP([.$X434];[$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43.png</text:p>
          </table:table-cell>
          <table:table-cell table:style-name="ce11" table:formula="of:=CONCATENATE([$JSON.$A$1];[.$C434];[$JSON.$B$1];[.$E434];[$JSON.$C$1];[.F434];[$JSON.$D$1];[.$G434];[$JSON.$E$1];IF(ISNA([.$T434]);&quot;null&quot;;&quot;&quot;&quot;&quot;&amp;[.$T434]&amp;&quot;&quot;&quot;&quot;);[$JSON.$F$1];[.$V434];[$JSON.$G$1];IF(ISNA([.$X434]);&quot;null&quot;;&quot;&quot;&quot;&quot;&amp;[.$X434]&amp;&quot;&quot;&quot;&quot;);[$JSON.$H$1];[.$AA434];[$JSON.$I$1];[.$I434];[$JSON.$J$1];[.K434];[$JSON.$K$1];[.$M434];[$JSON.$L$1];[.$P434];[$JSON.$M$1];[.$O434];[$JSON.$N$1];[.$S434];[$JSON.$O$1];[.$U434];[$JSON.$P$1];IF(ISNA([.$W434]);&quot;null&quot;;[.$W434]);[$JSON.$Q$1];[.$Y434];[$JSON.$R$1];IF([.$Z434];&quot;true&quot;;&quot;false&quot;);[$JSON.$S$1];[.$A434];[$JSON.$T$1];[.$B434];[$JSON.$U$1])" office:value-type="string" office:string-value="{&quot;id&quot;:&quot;2nd1-43&quot;,&quot;name&quot;:&quot;北条氏康&quot;,&quot;displayName&quot;:&quot;北条氏康&quot;,&quot;kana&quot;:&quot;ほうじょううじやす&quot;,&quot;traitText&quot;:null,&quot;ruleText&quot;:&quot;この能力は、自分の戦場に他のイジンがいないなら、これが戦場に置かれたときに発動する。イジン召喚権+1する。&quot;,&quot;legacyText&quot;:&quot;1ドローする&quot;,&quot;imageUrl&quot;:&quot;https://one-draw.jp/ijinden/cardlist/005/card/05_043.png&quot;,&quot;expansion&quot;:55,&quot;rarity&quot;:1,&quot;type&quot;:1,&quot;level&quot;:2,&quot;color&quot;:8,&quot;term&quot;:0,&quot;trait&quot;:0,&quot;power&quot;:1500,&quot;legacy&quot;:4,&quot;anyNumCopies&quot;:false,&quot;orderTable&quot;:433,&quot;orderDeck&quot;:73}," calcext:value-type="string">
            <text:p>{"id":"2nd1-43","name":"北条氏康","displayName":"北条氏康","kana":"ほうじょううじやす","traitText":null,"ruleText":"この能力は、自分の戦場に他のイジンがいないなら、これが戦場に置かれたときに発動する。イジン召喚権+1する。","legacyText":"1ドローする","imageUrl":"https://one-draw.jp/ijinden/cardlist/005/card/05_043.png","expansion":55,"rarity":1,"type":1,"level":2,"color":8,"term":0,"trait":0,"power":1500,"legacy":4,"anyNumCopies":false,"orderTable":433,"orderDeck":73},</text:p>
          </table:table-cell>
          <table:table-cell table:number-columns-repeated="16356"/>
        </table:table-row>
        <table:table-row table:style-name="ro2">
          <table:table-cell table:style-name="ce11" office:value-type="float" office:value="434" calcext:value-type="float">
            <text:p>434</text:p>
          </table:table-cell>
          <table:table-cell table:style-name="ce11" office:value-type="float" office:value="252" calcext:value-type="float">
            <text:p>252</text:p>
          </table:table-cell>
          <table:table-cell table:formula="of:=CONCATENATE(&quot;2nd1-&quot;;TEXT([.D435];&quot;0&quot;))" office:value-type="string" office:string-value="2nd1-44" calcext:value-type="string">
            <text:p>2nd1-44</text:p>
          </table:table-cell>
          <table:table-cell office:value-type="float" office:value="44" calcext:value-type="float">
            <text:p>44</text:p>
          </table:table-cell>
          <table:table-cell office:value-type="string" calcext:value-type="string">
            <text:p>北条早雲</text:p>
          </table:table-cell>
          <table:table-cell table:style-name="ce11" table:formula="of:=[.E435]" office:value-type="string" office:string-value="北条早雲" calcext:value-type="string">
            <text:p>北条早雲</text:p>
          </table:table-cell>
          <table:table-cell office:value-type="string" calcext:value-type="string">
            <text:p>ほうじょうそううん</text:p>
          </table:table-cell>
          <table:table-cell table:style-name="ce11" office:value-type="string" calcext:value-type="string">
            <text:p>第５弾ブースターパック</text:p>
          </table:table-cell>
          <table:table-cell table:style-name="ce11" table:formula="of:=VLOOKUP([.H435];[$収録番号.$A$1:$収録番号.$B$10];2;0)" office:value-type="float" office:value="55" calcext:value-type="float">
            <text:p>55</text:p>
          </table:table-cell>
          <table:table-cell office:value-type="string" calcext:value-type="string">
            <text:p>N</text:p>
          </table:table-cell>
          <table:table-cell table:style-name="ce11" table:formula="of:=VLOOKUP([.J435];[$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35];[$種類番号.$A$1:$種類番号.$B$4];2;0)" office:value-type="float" office:value="1" calcext:value-type="float">
            <text:p>1</text:p>
          </table:table-cell>
          <table:table-cell office:value-type="string" calcext:value-type="string">
            <text:p>黄</text:p>
          </table:table-cell>
          <table:table-cell table:style-name="ce11" table:formula="of:=VLOOKUP([.N435];[$色番号.$A$1:$色番号.$B$10];2;0)" office:value-type="float" office:value="8" calcext:value-type="float">
            <text:p>8</text:p>
          </table:table-cell>
          <table:table-cell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35];[$特性番号.$A$1:$特性番号.$B$8];2;0);0)" office:value-type="float" office:value="0" calcext:value-type="float">
            <text:p>0</text:p>
          </table:table-cell>
          <table:table-cell office:value-type="string" calcext:value-type="string">
            <text:p>ダブルプレッシャー¶ドレイン</text:p>
          </table:table-cell>
          <table:table-cell office:value-type="float" office:value="5500" calcext:value-type="float">
            <text:p>5500</text:p>
          </table:table-cell>
          <table:table-cell table:style-name="ce25" table:formula="of:=NA()" office:value-type="string" office:string-value="" calcext:value-type="error">
            <text:p>#N/A</text:p>
          </table:table-cell>
          <table:table-cell table:style-name="ce11" table:formula="of:=IFERROR(VLOOKUP([.$X435];[$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44.png</text:p>
          </table:table-cell>
          <table:table-cell table:style-name="ce11" table:formula="of:=CONCATENATE([$JSON.$A$1];[.$C435];[$JSON.$B$1];[.$E435];[$JSON.$C$1];[.F435];[$JSON.$D$1];[.$G435];[$JSON.$E$1];IF(ISNA([.$T435]);&quot;null&quot;;&quot;&quot;&quot;&quot;&amp;[.$T435]&amp;&quot;&quot;&quot;&quot;);[$JSON.$F$1];[.$V435];[$JSON.$G$1];IF(ISNA([.$X435]);&quot;null&quot;;&quot;&quot;&quot;&quot;&amp;[.$X435]&amp;&quot;&quot;&quot;&quot;);[$JSON.$H$1];[.$AA435];[$JSON.$I$1];[.$I435];[$JSON.$J$1];[.K435];[$JSON.$K$1];[.$M435];[$JSON.$L$1];[.$P435];[$JSON.$M$1];[.$O435];[$JSON.$N$1];[.$S435];[$JSON.$O$1];[.$U435];[$JSON.$P$1];IF(ISNA([.$W435]);&quot;null&quot;;[.$W435]);[$JSON.$Q$1];[.$Y435];[$JSON.$R$1];IF([.$Z435];&quot;true&quot;;&quot;false&quot;);[$JSON.$S$1];[.$A435];[$JSON.$T$1];[.$B435];[$JSON.$U$1])" office:value-type="string" office:string-value="{&quot;id&quot;:&quot;2nd1-44&quot;,&quot;name&quot;:&quot;北条早雲&quot;,&quot;displayName&quot;:&quot;北条早雲&quot;,&quot;kana&quot;:&quot;ほうじょうそううん&quot;,&quot;traitText&quot;:null,&quot;ruleText&quot;:&quot;ダブルプレッシャー¶ドレイン&quot;,&quot;legacyText&quot;:null,&quot;imageUrl&quot;:&quot;https://one-draw.jp/ijinden/cardlist/005/card/05_044.png&quot;,&quot;expansion&quot;:55,&quot;rarity&quot;:1,&quot;type&quot;:1,&quot;level&quot;:6,&quot;color&quot;:8,&quot;term&quot;:0,&quot;trait&quot;:0,&quot;power&quot;:5500,&quot;legacy&quot;:0,&quot;anyNumCopies&quot;:false,&quot;orderTable&quot;:434,&quot;orderDeck&quot;:252}," calcext:value-type="string">
            <text:p>{"id":"2nd1-44","name":"北条早雲","displayName":"北条早雲","kana":"ほうじょうそううん","traitText":null,"ruleText":"ダブルプレッシャー¶ドレイン","legacyText":null,"imageUrl":"https://one-draw.jp/ijinden/cardlist/005/card/05_044.png","expansion":55,"rarity":1,"type":1,"level":6,"color":8,"term":0,"trait":0,"power":5500,"legacy":0,"anyNumCopies":false,"orderTable":434,"orderDeck":252},</text:p>
          </table:table-cell>
          <table:table-cell table:number-columns-repeated="16356"/>
        </table:table-row>
        <table:table-row table:style-name="ro2">
          <table:table-cell table:style-name="ce11" office:value-type="float" office:value="435" calcext:value-type="float">
            <text:p>435</text:p>
          </table:table-cell>
          <table:table-cell table:style-name="ce11" office:value-type="float" office:value="127" calcext:value-type="float">
            <text:p>127</text:p>
          </table:table-cell>
          <table:table-cell table:formula="of:=CONCATENATE(&quot;2nd1-&quot;;TEXT([.D436];&quot;0&quot;))" office:value-type="string" office:string-value="2nd1-45" calcext:value-type="string">
            <text:p>2nd1-45</text:p>
          </table:table-cell>
          <table:table-cell office:value-type="float" office:value="45" calcext:value-type="float">
            <text:p>45</text:p>
          </table:table-cell>
          <table:table-cell office:value-type="string" calcext:value-type="string">
            <text:p>ルイス・ヘンリー・モーガン</text:p>
          </table:table-cell>
          <table:table-cell table:style-name="ce11" table:formula="of:=[.E436]" office:value-type="string" office:string-value="ルイス・ヘンリー・モーガン" calcext:value-type="string">
            <text:p>ルイス・ヘンリー・モーガン</text:p>
          </table:table-cell>
          <table:table-cell office:value-type="string" calcext:value-type="string">
            <text:p>るいすへんりーもーがん</text:p>
          </table:table-cell>
          <table:table-cell table:style-name="ce11" office:value-type="string" calcext:value-type="string">
            <text:p>第５弾ブースターパック</text:p>
          </table:table-cell>
          <table:table-cell table:style-name="ce11" table:formula="of:=VLOOKUP([.H436];[$収録番号.$A$1:$収録番号.$B$10];2;0)" office:value-type="float" office:value="55" calcext:value-type="float">
            <text:p>55</text:p>
          </table:table-cell>
          <table:table-cell office:value-type="string" calcext:value-type="string">
            <text:p>R</text:p>
          </table:table-cell>
          <table:table-cell table:style-name="ce11" table:formula="of:=VLOOKUP([.J436];[$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36];[$種類番号.$A$1:$種類番号.$B$4];2;0)" office:value-type="float" office:value="1" calcext:value-type="float">
            <text:p>1</text:p>
          </table:table-cell>
          <table:table-cell office:value-type="string" calcext:value-type="string">
            <text:p>黄</text:p>
          </table:table-cell>
          <table:table-cell table:style-name="ce11" table:formula="of:=VLOOKUP([.N436];[$色番号.$A$1:$色番号.$B$10];2;0)" office:value-type="float" office:value="8" calcext:value-type="float">
            <text:p>8</text:p>
          </table:table-cell>
          <table:table-cell office:value-type="float" office:value="3" calcext:value-type="float">
            <text:p>3</text:p>
          </table:table-cell>
          <table:table-cell table:style-name="ce11" table:formula="of:=NA()" office:value-type="string" office:string-value="" calcext:value-type="error">
            <text:p>#N/A</text:p>
          </table:table-cell>
          <table:table-cell office:value-type="string" calcext:value-type="string">
            <text:p>執筆</text:p>
          </table:table-cell>
          <table:table-cell table:style-name="ce11" table:formula="of:=IFERROR(VLOOKUP([.$R436];[$能力語番号.$A$1:$能力語番号.$B$11];2;0);0)" office:value-type="float" office:value="2" calcext:value-type="float">
            <text:p>2</text:p>
          </table:table-cell>
          <table:table-cell table:formula="of:=NA()" office:value-type="string" office:string-value="" calcext:value-type="error">
            <text:p>#N/A</text:p>
          </table:table-cell>
          <table:table-cell table:style-name="ce11" table:formula="of:=IFERROR(VLOOKUP([.$T436];[$特性番号.$A$1:$特性番号.$B$8];2;0);0)" office:value-type="float" office:value="0" calcext:value-type="float">
            <text:p>0</text:p>
          </table:table-cell>
          <table:table-cell office:value-type="string" calcext:value-type="string">
            <text:p>執筆 - この能力は、自分か相手の戦場にハイケイが置かれたときに戦場で発動できる。自分の墓地の黄のマホウ1つを手札に戻す。</text:p>
          </table:table-cell>
          <table:table-cell office:value-type="float" office:value="2000" calcext:value-type="float">
            <text:p>2000</text:p>
          </table:table-cell>
          <table:table-cell office:value-type="string" calcext:value-type="string">
            <text:p>1ドローする</text:p>
          </table:table-cell>
          <table:table-cell table:style-name="ce11" table:formula="of:=IFERROR(VLOOKUP([.$X436];[$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45.png</text:p>
          </table:table-cell>
          <table:table-cell table:style-name="ce11" table:formula="of:=CONCATENATE([$JSON.$A$1];[.$C436];[$JSON.$B$1];[.$E436];[$JSON.$C$1];[.F436];[$JSON.$D$1];[.$G436];[$JSON.$E$1];IF(ISNA([.$T436]);&quot;null&quot;;&quot;&quot;&quot;&quot;&amp;[.$T436]&amp;&quot;&quot;&quot;&quot;);[$JSON.$F$1];[.$V436];[$JSON.$G$1];IF(ISNA([.$X436]);&quot;null&quot;;&quot;&quot;&quot;&quot;&amp;[.$X436]&amp;&quot;&quot;&quot;&quot;);[$JSON.$H$1];[.$AA436];[$JSON.$I$1];[.$I436];[$JSON.$J$1];[.K436];[$JSON.$K$1];[.$M436];[$JSON.$L$1];[.$P436];[$JSON.$M$1];[.$O436];[$JSON.$N$1];[.$S436];[$JSON.$O$1];[.$U436];[$JSON.$P$1];IF(ISNA([.$W436]);&quot;null&quot;;[.$W436]);[$JSON.$Q$1];[.$Y436];[$JSON.$R$1];IF([.$Z436];&quot;true&quot;;&quot;false&quot;);[$JSON.$S$1];[.$A436];[$JSON.$T$1];[.$B436];[$JSON.$U$1])" office:value-type="string" office:string-value="{&quot;id&quot;:&quot;2nd1-45&quot;,&quot;name&quot;:&quot;ルイス・ヘンリー・モーガン&quot;,&quot;displayName&quot;:&quot;ルイス・ヘンリー・モーガン&quot;,&quot;kana&quot;:&quot;るいすへんりーもーがん&quot;,&quot;traitText&quot;:null,&quot;ruleText&quot;:&quot;執筆 - この能力は、自分か相手の戦場にハイケイが置かれたときに戦場で発動できる。自分の墓地の黄のマホウ1つを手札に戻す。&quot;,&quot;legacyText&quot;:&quot;1ドローする&quot;,&quot;imageUrl&quot;:&quot;https://one-draw.jp/ijinden/cardlist/005/card/05_045.png&quot;,&quot;expansion&quot;:55,&quot;rarity&quot;:2,&quot;type&quot;:1,&quot;level&quot;:3,&quot;color&quot;:8,&quot;term&quot;:2,&quot;trait&quot;:0,&quot;power&quot;:2000,&quot;legacy&quot;:4,&quot;anyNumCopies&quot;:false,&quot;orderTable&quot;:435,&quot;orderDeck&quot;:127}," calcext:value-type="string">
            <text:p>{"id":"2nd1-45","name":"ルイス・ヘンリー・モーガン","displayName":"ルイス・ヘンリー・モーガン","kana":"るいすへんりーもーがん","traitText":null,"ruleText":"執筆 - この能力は、自分か相手の戦場にハイケイが置かれたときに戦場で発動できる。自分の墓地の黄のマホウ1つを手札に戻す。","legacyText":"1ドローする","imageUrl":"https://one-draw.jp/ijinden/cardlist/005/card/05_045.png","expansion":55,"rarity":2,"type":1,"level":3,"color":8,"term":2,"trait":0,"power":2000,"legacy":4,"anyNumCopies":false,"orderTable":435,"orderDeck":127},</text:p>
          </table:table-cell>
          <table:table-cell table:number-columns-repeated="16356"/>
        </table:table-row>
        <table:table-row table:style-name="ro2">
          <table:table-cell table:style-name="ce11" office:value-type="float" office:value="436" calcext:value-type="float">
            <text:p>436</text:p>
          </table:table-cell>
          <table:table-cell table:style-name="ce11" office:value-type="float" office:value="220" calcext:value-type="float">
            <text:p>220</text:p>
          </table:table-cell>
          <table:table-cell table:formula="of:=CONCATENATE(&quot;2nd1-&quot;;TEXT([.D437];&quot;0&quot;))" office:value-type="string" office:string-value="2nd1-46" calcext:value-type="string">
            <text:p>2nd1-46</text:p>
          </table:table-cell>
          <table:table-cell office:value-type="float" office:value="46" calcext:value-type="float">
            <text:p>46</text:p>
          </table:table-cell>
          <table:table-cell office:value-type="string" calcext:value-type="string">
            <text:p>項羽</text:p>
          </table:table-cell>
          <table:table-cell table:style-name="ce11" table:formula="of:=[.E437]" office:value-type="string" office:string-value="項羽" calcext:value-type="string">
            <text:p>項羽</text:p>
          </table:table-cell>
          <table:table-cell office:value-type="string" calcext:value-type="string">
            <text:p>こうう</text:p>
          </table:table-cell>
          <table:table-cell table:style-name="ce11" office:value-type="string" calcext:value-type="string">
            <text:p>第５弾ブースターパック</text:p>
          </table:table-cell>
          <table:table-cell table:style-name="ce11" table:formula="of:=VLOOKUP([.H437];[$収録番号.$A$1:$収録番号.$B$10];2;0)" office:value-type="float" office:value="55" calcext:value-type="float">
            <text:p>55</text:p>
          </table:table-cell>
          <table:table-cell office:value-type="string" calcext:value-type="string">
            <text:p>N</text:p>
          </table:table-cell>
          <table:table-cell table:style-name="ce11" table:formula="of:=VLOOKUP([.J437];[$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37];[$種類番号.$A$1:$種類番号.$B$4];2;0)" office:value-type="float" office:value="1" calcext:value-type="float">
            <text:p>1</text:p>
          </table:table-cell>
          <table:table-cell office:value-type="string" calcext:value-type="string">
            <text:p>黄</text:p>
          </table:table-cell>
          <table:table-cell table:style-name="ce11" table:formula="of:=VLOOKUP([.N437];[$色番号.$A$1:$色番号.$B$10];2;0)" office:value-type="float" office:value="8" calcext:value-type="float">
            <text:p>8</text:p>
          </table:table-cell>
          <table:table-cell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37];[$特性番号.$A$1:$特性番号.$B$8];2;0);0)" office:value-type="float" office:value="0" calcext:value-type="float">
            <text:p>0</text:p>
          </table:table-cell>
          <table:table-cell office:value-type="string" calcext:value-type="string">
            <text:p>ドレイン¶ウォッチャー</text:p>
          </table:table-cell>
          <table:table-cell office:value-type="float" office:value="4500" calcext:value-type="float">
            <text:p>4500</text:p>
          </table:table-cell>
          <table:table-cell office:value-type="string" calcext:value-type="string">
            <text:p>1ドローする</text:p>
          </table:table-cell>
          <table:table-cell table:style-name="ce11" table:formula="of:=IFERROR(VLOOKUP([.$X437];[$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46.png</text:p>
          </table:table-cell>
          <table:table-cell table:style-name="ce11" table:formula="of:=CONCATENATE([$JSON.$A$1];[.$C437];[$JSON.$B$1];[.$E437];[$JSON.$C$1];[.F437];[$JSON.$D$1];[.$G437];[$JSON.$E$1];IF(ISNA([.$T437]);&quot;null&quot;;&quot;&quot;&quot;&quot;&amp;[.$T437]&amp;&quot;&quot;&quot;&quot;);[$JSON.$F$1];[.$V437];[$JSON.$G$1];IF(ISNA([.$X437]);&quot;null&quot;;&quot;&quot;&quot;&quot;&amp;[.$X437]&amp;&quot;&quot;&quot;&quot;);[$JSON.$H$1];[.$AA437];[$JSON.$I$1];[.$I437];[$JSON.$J$1];[.K437];[$JSON.$K$1];[.$M437];[$JSON.$L$1];[.$P437];[$JSON.$M$1];[.$O437];[$JSON.$N$1];[.$S437];[$JSON.$O$1];[.$U437];[$JSON.$P$1];IF(ISNA([.$W437]);&quot;null&quot;;[.$W437]);[$JSON.$Q$1];[.$Y437];[$JSON.$R$1];IF([.$Z437];&quot;true&quot;;&quot;false&quot;);[$JSON.$S$1];[.$A437];[$JSON.$T$1];[.$B437];[$JSON.$U$1])" office:value-type="string" office:string-value="{&quot;id&quot;:&quot;2nd1-46&quot;,&quot;name&quot;:&quot;項羽&quot;,&quot;displayName&quot;:&quot;項羽&quot;,&quot;kana&quot;:&quot;こうう&quot;,&quot;traitText&quot;:null,&quot;ruleText&quot;:&quot;ドレイン¶ウォッチャー&quot;,&quot;legacyText&quot;:&quot;1ドローする&quot;,&quot;imageUrl&quot;:&quot;https://one-draw.jp/ijinden/cardlist/005/card/05_046.png&quot;,&quot;expansion&quot;:55,&quot;rarity&quot;:1,&quot;type&quot;:1,&quot;level&quot;:5,&quot;color&quot;:8,&quot;term&quot;:0,&quot;trait&quot;:0,&quot;power&quot;:4500,&quot;legacy&quot;:4,&quot;anyNumCopies&quot;:false,&quot;orderTable&quot;:436,&quot;orderDeck&quot;:220}," calcext:value-type="string">
            <text:p>{"id":"2nd1-46","name":"項羽","displayName":"項羽","kana":"こうう","traitText":null,"ruleText":"ドレイン¶ウォッチャー","legacyText":"1ドローする","imageUrl":"https://one-draw.jp/ijinden/cardlist/005/card/05_046.png","expansion":55,"rarity":1,"type":1,"level":5,"color":8,"term":0,"trait":0,"power":4500,"legacy":4,"anyNumCopies":false,"orderTable":436,"orderDeck":220},</text:p>
          </table:table-cell>
          <table:table-cell table:number-columns-repeated="16356"/>
        </table:table-row>
        <table:table-row table:style-name="ro2">
          <table:table-cell table:style-name="ce11" office:value-type="float" office:value="437" calcext:value-type="float">
            <text:p>437</text:p>
          </table:table-cell>
          <table:table-cell table:style-name="ce11" office:value-type="float" office:value="174" calcext:value-type="float">
            <text:p>174</text:p>
          </table:table-cell>
          <table:table-cell table:formula="of:=CONCATENATE(&quot;2nd1-&quot;;TEXT([.D438];&quot;0&quot;))" office:value-type="string" office:string-value="2nd1-47" calcext:value-type="string">
            <text:p>2nd1-47</text:p>
          </table:table-cell>
          <table:table-cell office:value-type="float" office:value="47" calcext:value-type="float">
            <text:p>47</text:p>
          </table:table-cell>
          <table:table-cell office:value-type="string" calcext:value-type="string">
            <text:p>韓信</text:p>
          </table:table-cell>
          <table:table-cell table:style-name="ce11" table:formula="of:=[.E438]" office:value-type="string" office:string-value="韓信" calcext:value-type="string">
            <text:p>韓信</text:p>
          </table:table-cell>
          <table:table-cell office:value-type="string" calcext:value-type="string">
            <text:p>かんしん</text:p>
          </table:table-cell>
          <table:table-cell table:style-name="ce11" office:value-type="string" calcext:value-type="string">
            <text:p>第５弾ブースターパック</text:p>
          </table:table-cell>
          <table:table-cell table:style-name="ce11" table:formula="of:=VLOOKUP([.H438];[$収録番号.$A$1:$収録番号.$B$10];2;0)" office:value-type="float" office:value="55" calcext:value-type="float">
            <text:p>55</text:p>
          </table:table-cell>
          <table:table-cell office:value-type="string" calcext:value-type="string">
            <text:p>N</text:p>
          </table:table-cell>
          <table:table-cell table:style-name="ce11" table:formula="of:=VLOOKUP([.J438];[$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38];[$種類番号.$A$1:$種類番号.$B$4];2;0)" office:value-type="float" office:value="1" calcext:value-type="float">
            <text:p>1</text:p>
          </table:table-cell>
          <table:table-cell office:value-type="string" calcext:value-type="string">
            <text:p>黄</text:p>
          </table:table-cell>
          <table:table-cell table:style-name="ce11" table:formula="of:=VLOOKUP([.N438];[$色番号.$A$1:$色番号.$B$10];2;0)" office:value-type="float" office:value="8" calcext:value-type="float">
            <text:p>8</text:p>
          </table:table-cell>
          <table:table-cell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38];[$特性番号.$A$1:$特性番号.$B$8];2;0);0)" office:value-type="float" office:value="0" calcext:value-type="float">
            <text:p>0</text:p>
          </table:table-cell>
          <table:table-cell office:value-type="string" calcext:value-type="string">
            <text:p>この能力は、自分の戦場に「ドレイン」を持つイジンがいるなら、戦場で効果を発揮する。バトル解決において、これに負けたアタッカーは、破壊される代わりに山札の下に戻される。¶ウォッチャー</text:p>
          </table:table-cell>
          <table:table-cell office:value-type="float" office:value="3000" calcext:value-type="float">
            <text:p>3000</text:p>
          </table:table-cell>
          <table:table-cell office:value-type="string" calcext:value-type="string">
            <text:p>1ドローする</text:p>
          </table:table-cell>
          <table:table-cell table:style-name="ce11" table:formula="of:=IFERROR(VLOOKUP([.$X438];[$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47.png</text:p>
          </table:table-cell>
          <table:table-cell table:style-name="ce11" table:formula="of:=CONCATENATE([$JSON.$A$1];[.$C438];[$JSON.$B$1];[.$E438];[$JSON.$C$1];[.F438];[$JSON.$D$1];[.$G438];[$JSON.$E$1];IF(ISNA([.$T438]);&quot;null&quot;;&quot;&quot;&quot;&quot;&amp;[.$T438]&amp;&quot;&quot;&quot;&quot;);[$JSON.$F$1];[.$V438];[$JSON.$G$1];IF(ISNA([.$X438]);&quot;null&quot;;&quot;&quot;&quot;&quot;&amp;[.$X438]&amp;&quot;&quot;&quot;&quot;);[$JSON.$H$1];[.$AA438];[$JSON.$I$1];[.$I438];[$JSON.$J$1];[.K438];[$JSON.$K$1];[.$M438];[$JSON.$L$1];[.$P438];[$JSON.$M$1];[.$O438];[$JSON.$N$1];[.$S438];[$JSON.$O$1];[.$U438];[$JSON.$P$1];IF(ISNA([.$W438]);&quot;null&quot;;[.$W438]);[$JSON.$Q$1];[.$Y438];[$JSON.$R$1];IF([.$Z438];&quot;true&quot;;&quot;false&quot;);[$JSON.$S$1];[.$A438];[$JSON.$T$1];[.$B438];[$JSON.$U$1])" office:value-type="string" office:string-value="{&quot;id&quot;:&quot;2nd1-47&quot;,&quot;name&quot;:&quot;韓信&quot;,&quot;displayName&quot;:&quot;韓信&quot;,&quot;kana&quot;:&quot;かんしん&quot;,&quot;traitText&quot;:null,&quot;ruleText&quot;:&quot;この能力は、自分の戦場に「ドレイン」を持つイジンがいるなら、戦場で効果を発揮する。バトル解決において、これに負けたアタッカーは、破壊される代わりに山札の下に戻される。¶ウォッチャー&quot;,&quot;legacyText&quot;:&quot;1ドローする&quot;,&quot;imageUrl&quot;:&quot;https://one-draw.jp/ijinden/cardlist/005/card/05_047.png&quot;,&quot;expansion&quot;:55,&quot;rarity&quot;:1,&quot;type&quot;:1,&quot;level&quot;:4,&quot;color&quot;:8,&quot;term&quot;:0,&quot;trait&quot;:0,&quot;power&quot;:3000,&quot;legacy&quot;:4,&quot;anyNumCopies&quot;:false,&quot;orderTable&quot;:437,&quot;orderDeck&quot;:174}," calcext:value-type="string">
            <text:p>{"id":"2nd1-47","name":"韓信","displayName":"韓信","kana":"かんしん","traitText":null,"ruleText":"この能力は、自分の戦場に「ドレイン」を持つイジンがいるなら、戦場で効果を発揮する。バトル解決において、これに負けたアタッカーは、破壊される代わりに山札の下に戻される。¶ウォッチャー","legacyText":"1ドローする","imageUrl":"https://one-draw.jp/ijinden/cardlist/005/card/05_047.png","expansion":55,"rarity":1,"type":1,"level":4,"color":8,"term":0,"trait":0,"power":3000,"legacy":4,"anyNumCopies":false,"orderTable":437,"orderDeck":174},</text:p>
          </table:table-cell>
          <table:table-cell table:number-columns-repeated="16356"/>
        </table:table-row>
        <table:table-row table:style-name="ro2">
          <table:table-cell table:style-name="ce11" office:value-type="float" office:value="438" calcext:value-type="float">
            <text:p>438</text:p>
          </table:table-cell>
          <table:table-cell table:style-name="ce11" office:value-type="float" office:value="74" calcext:value-type="float">
            <text:p>74</text:p>
          </table:table-cell>
          <table:table-cell table:formula="of:=CONCATENATE(&quot;2nd1-&quot;;TEXT([.D439];&quot;0&quot;))" office:value-type="string" office:string-value="2nd1-48" calcext:value-type="string">
            <text:p>2nd1-48</text:p>
          </table:table-cell>
          <table:table-cell office:value-type="float" office:value="48" calcext:value-type="float">
            <text:p>48</text:p>
          </table:table-cell>
          <table:table-cell office:value-type="string" calcext:value-type="string">
            <text:p>フリードリヒ・エンゲルス</text:p>
          </table:table-cell>
          <table:table-cell table:style-name="ce11" table:formula="of:=[.E439]" office:value-type="string" office:string-value="フリードリヒ・エンゲルス" calcext:value-type="string">
            <text:p>フリードリヒ・エンゲルス</text:p>
          </table:table-cell>
          <table:table-cell office:value-type="string" calcext:value-type="string">
            <text:p>ふりーどりひえんげるす</text:p>
          </table:table-cell>
          <table:table-cell table:style-name="ce11" office:value-type="string" calcext:value-type="string">
            <text:p>第５弾ブースターパック</text:p>
          </table:table-cell>
          <table:table-cell table:style-name="ce11" table:formula="of:=VLOOKUP([.H439];[$収録番号.$A$1:$収録番号.$B$10];2;0)" office:value-type="float" office:value="55" calcext:value-type="float">
            <text:p>55</text:p>
          </table:table-cell>
          <table:table-cell office:value-type="string" calcext:value-type="string">
            <text:p>R</text:p>
          </table:table-cell>
          <table:table-cell table:style-name="ce11" table:formula="of:=VLOOKUP([.J439];[$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39];[$種類番号.$A$1:$種類番号.$B$4];2;0)" office:value-type="float" office:value="1" calcext:value-type="float">
            <text:p>1</text:p>
          </table:table-cell>
          <table:table-cell office:value-type="string" calcext:value-type="string">
            <text:p>黄</text:p>
          </table:table-cell>
          <table:table-cell table:style-name="ce11" table:formula="of:=VLOOKUP([.N439];[$色番号.$A$1:$色番号.$B$10];2;0)" office:value-type="float" office:value="8" calcext:value-type="float">
            <text:p>8</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3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39];[$特性番号.$A$1:$特性番号.$B$8];2;0);0)" office:value-type="float" office:value="0" calcext:value-type="float">
            <text:p>0</text:p>
          </table:table-cell>
          <table:table-cell office:value-type="string" calcext:value-type="string">
            <text:p>この能力は、自分の魔力ゾーンに『ストーン』マリョクがあるなら、戦場で効果を発揮する。自分の魔力レベルは2だけ上がる。</text:p>
          </table:table-cell>
          <table:table-cell office:value-type="float" office:value="500" calcext:value-type="float">
            <text:p>500</text:p>
          </table:table-cell>
          <table:table-cell office:value-type="string" calcext:value-type="string">
            <text:p>1ドローする</text:p>
          </table:table-cell>
          <table:table-cell table:style-name="ce11" table:formula="of:=IFERROR(VLOOKUP([.$X439];[$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48.png</text:p>
          </table:table-cell>
          <table:table-cell table:style-name="ce11" table:formula="of:=CONCATENATE([$JSON.$A$1];[.$C439];[$JSON.$B$1];[.$E439];[$JSON.$C$1];[.F439];[$JSON.$D$1];[.$G439];[$JSON.$E$1];IF(ISNA([.$T439]);&quot;null&quot;;&quot;&quot;&quot;&quot;&amp;[.$T439]&amp;&quot;&quot;&quot;&quot;);[$JSON.$F$1];[.$V439];[$JSON.$G$1];IF(ISNA([.$X439]);&quot;null&quot;;&quot;&quot;&quot;&quot;&amp;[.$X439]&amp;&quot;&quot;&quot;&quot;);[$JSON.$H$1];[.$AA439];[$JSON.$I$1];[.$I439];[$JSON.$J$1];[.K439];[$JSON.$K$1];[.$M439];[$JSON.$L$1];[.$P439];[$JSON.$M$1];[.$O439];[$JSON.$N$1];[.$S439];[$JSON.$O$1];[.$U439];[$JSON.$P$1];IF(ISNA([.$W439]);&quot;null&quot;;[.$W439]);[$JSON.$Q$1];[.$Y439];[$JSON.$R$1];IF([.$Z439];&quot;true&quot;;&quot;false&quot;);[$JSON.$S$1];[.$A439];[$JSON.$T$1];[.$B439];[$JSON.$U$1])" office:value-type="string" office:string-value="{&quot;id&quot;:&quot;2nd1-48&quot;,&quot;name&quot;:&quot;フリードリヒ・エンゲルス&quot;,&quot;displayName&quot;:&quot;フリードリヒ・エンゲルス&quot;,&quot;kana&quot;:&quot;ふりーどりひえんげるす&quot;,&quot;traitText&quot;:null,&quot;ruleText&quot;:&quot;この能力は、自分の魔力ゾーンに『ストーン』マリョクがあるなら、戦場で効果を発揮する。自分の魔力レベルは2だけ上がる。&quot;,&quot;legacyText&quot;:&quot;1ドローする&quot;,&quot;imageUrl&quot;:&quot;https://one-draw.jp/ijinden/cardlist/005/card/05_048.png&quot;,&quot;expansion&quot;:55,&quot;rarity&quot;:2,&quot;type&quot;:1,&quot;level&quot;:2,&quot;color&quot;:8,&quot;term&quot;:0,&quot;trait&quot;:0,&quot;power&quot;:500,&quot;legacy&quot;:4,&quot;anyNumCopies&quot;:false,&quot;orderTable&quot;:438,&quot;orderDeck&quot;:74}," calcext:value-type="string">
            <text:p>{"id":"2nd1-48","name":"フリードリヒ・エンゲルス","displayName":"フリードリヒ・エンゲルス","kana":"ふりーどりひえんげるす","traitText":null,"ruleText":"この能力は、自分の魔力ゾーンに『ストーン』マリョクがあるなら、戦場で効果を発揮する。自分の魔力レベルは2だけ上がる。","legacyText":"1ドローする","imageUrl":"https://one-draw.jp/ijinden/cardlist/005/card/05_048.png","expansion":55,"rarity":2,"type":1,"level":2,"color":8,"term":0,"trait":0,"power":500,"legacy":4,"anyNumCopies":false,"orderTable":438,"orderDeck":74},</text:p>
          </table:table-cell>
          <table:table-cell table:number-columns-repeated="16356"/>
        </table:table-row>
        <table:table-row table:style-name="ro2">
          <table:table-cell table:style-name="ce11" office:value-type="float" office:value="439" calcext:value-type="float">
            <text:p>439</text:p>
          </table:table-cell>
          <table:table-cell table:style-name="ce11" office:value-type="float" office:value="253" calcext:value-type="float">
            <text:p>253</text:p>
          </table:table-cell>
          <table:table-cell table:formula="of:=CONCATENATE(&quot;2nd1-&quot;;TEXT([.D440];&quot;0&quot;))" office:value-type="string" office:string-value="2nd1-49" calcext:value-type="string">
            <text:p>2nd1-49</text:p>
          </table:table-cell>
          <table:table-cell office:value-type="float" office:value="49" calcext:value-type="float">
            <text:p>49</text:p>
          </table:table-cell>
          <table:table-cell office:value-type="string" calcext:value-type="string">
            <text:p>フビライ・ハン</text:p>
          </table:table-cell>
          <table:table-cell office:value-type="string" calcext:value-type="string">
            <text:p>フビライ・ハン (第5弾)</text:p>
          </table:table-cell>
          <table:table-cell office:value-type="string" calcext:value-type="string">
            <text:p>ふびらいはん</text:p>
          </table:table-cell>
          <table:table-cell table:style-name="ce11" office:value-type="string" calcext:value-type="string">
            <text:p>第５弾ブースターパック</text:p>
          </table:table-cell>
          <table:table-cell table:style-name="ce11" table:formula="of:=VLOOKUP([.H440];[$収録番号.$A$1:$収録番号.$B$10];2;0)" office:value-type="float" office:value="55" calcext:value-type="float">
            <text:p>55</text:p>
          </table:table-cell>
          <table:table-cell office:value-type="string" calcext:value-type="string">
            <text:p>N</text:p>
          </table:table-cell>
          <table:table-cell table:style-name="ce11" table:formula="of:=VLOOKUP([.J440];[$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40];[$種類番号.$A$1:$種類番号.$B$4];2;0)" office:value-type="float" office:value="1" calcext:value-type="float">
            <text:p>1</text:p>
          </table:table-cell>
          <table:table-cell office:value-type="string" calcext:value-type="string">
            <text:p>黄</text:p>
          </table:table-cell>
          <table:table-cell table:style-name="ce11" table:formula="of:=VLOOKUP([.N440];[$色番号.$A$1:$色番号.$B$10];2;0)" office:value-type="float" office:value="8" calcext:value-type="float">
            <text:p>8</text:p>
          </table:table-cell>
          <table:table-cell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4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40];[$特性番号.$A$1:$特性番号.$B$8];2;0);0)" office:value-type="float" office:value="0" calcext:value-type="float">
            <text:p>0</text:p>
          </table:table-cell>
          <table:table-cell office:value-type="string" calcext:value-type="string">
            <text:p>この能力は、これが戦場に置かれたとき、自分の魔力ゾーンの『ストーン』マリョク1つか2つを指定して発動できる。そのマリョクすべてを裏にして戦場に置く。¶ダブルプレッシャー</text:p>
          </table:table-cell>
          <table:table-cell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40];[$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49.png</text:p>
          </table:table-cell>
          <table:table-cell table:style-name="ce11" table:formula="of:=CONCATENATE([$JSON.$A$1];[.$C440];[$JSON.$B$1];[.$E440];[$JSON.$C$1];[.F440];[$JSON.$D$1];[.$G440];[$JSON.$E$1];IF(ISNA([.$T440]);&quot;null&quot;;&quot;&quot;&quot;&quot;&amp;[.$T440]&amp;&quot;&quot;&quot;&quot;);[$JSON.$F$1];[.$V440];[$JSON.$G$1];IF(ISNA([.$X440]);&quot;null&quot;;&quot;&quot;&quot;&quot;&amp;[.$X440]&amp;&quot;&quot;&quot;&quot;);[$JSON.$H$1];[.$AA440];[$JSON.$I$1];[.$I440];[$JSON.$J$1];[.K440];[$JSON.$K$1];[.$M440];[$JSON.$L$1];[.$P440];[$JSON.$M$1];[.$O440];[$JSON.$N$1];[.$S440];[$JSON.$O$1];[.$U440];[$JSON.$P$1];IF(ISNA([.$W440]);&quot;null&quot;;[.$W440]);[$JSON.$Q$1];[.$Y440];[$JSON.$R$1];IF([.$Z440];&quot;true&quot;;&quot;false&quot;);[$JSON.$S$1];[.$A440];[$JSON.$T$1];[.$B440];[$JSON.$U$1])" office:value-type="string" office:string-value="{&quot;id&quot;:&quot;2nd1-49&quot;,&quot;name&quot;:&quot;フビライ・ハン&quot;,&quot;displayName&quot;:&quot;フビライ・ハン (第5弾)&quot;,&quot;kana&quot;:&quot;ふびらいはん&quot;,&quot;traitText&quot;:null,&quot;ruleText&quot;:&quot;この能力は、これが戦場に置かれたとき、自分の魔力ゾーンの『ストーン』マリョク1つか2つを指定して発動できる。そのマリョクすべてを裏にして戦場に置く。¶ダブルプレッシャー&quot;,&quot;legacyText&quot;:null,&quot;imageUrl&quot;:&quot;https://one-draw.jp/ijinden/cardlist/005/card/05_049.png&quot;,&quot;expansion&quot;:55,&quot;rarity&quot;:1,&quot;type&quot;:1,&quot;level&quot;:6,&quot;color&quot;:8,&quot;term&quot;:0,&quot;trait&quot;:0,&quot;power&quot;:3000,&quot;legacy&quot;:0,&quot;anyNumCopies&quot;:false,&quot;orderTable&quot;:439,&quot;orderDeck&quot;:253}," calcext:value-type="string">
            <text:p>{"id":"2nd1-49","name":"フビライ・ハン","displayName":"フビライ・ハン (第5弾)","kana":"ふびらいはん","traitText":null,"ruleText":"この能力は、これが戦場に置かれたとき、自分の魔力ゾーンの『ストーン』マリョク1つか2つを指定して発動できる。そのマリョクすべてを裏にして戦場に置く。¶ダブルプレッシャー","legacyText":null,"imageUrl":"https://one-draw.jp/ijinden/cardlist/005/card/05_049.png","expansion":55,"rarity":1,"type":1,"level":6,"color":8,"term":0,"trait":0,"power":3000,"legacy":0,"anyNumCopies":false,"orderTable":439,"orderDeck":253},</text:p>
          </table:table-cell>
          <table:table-cell table:number-columns-repeated="16356"/>
        </table:table-row>
        <table:table-row table:style-name="ro2">
          <table:table-cell table:style-name="ce11" office:value-type="float" office:value="440" calcext:value-type="float">
            <text:p>440</text:p>
          </table:table-cell>
          <table:table-cell table:style-name="ce11" office:value-type="float" office:value="128" calcext:value-type="float">
            <text:p>128</text:p>
          </table:table-cell>
          <table:table-cell table:formula="of:=CONCATENATE(&quot;2nd1-&quot;;TEXT([.D441];&quot;0&quot;))" office:value-type="string" office:string-value="2nd1-50" calcext:value-type="string">
            <text:p>2nd1-50</text:p>
          </table:table-cell>
          <table:table-cell office:value-type="float" office:value="50" calcext:value-type="float">
            <text:p>50</text:p>
          </table:table-cell>
          <table:table-cell office:value-type="string" calcext:value-type="string">
            <text:p>孫策</text:p>
          </table:table-cell>
          <table:table-cell table:style-name="ce11" table:formula="of:=[.E441]" office:value-type="string" office:string-value="孫策" calcext:value-type="string">
            <text:p>孫策</text:p>
          </table:table-cell>
          <table:table-cell office:value-type="string" calcext:value-type="string">
            <text:p>そんさく</text:p>
          </table:table-cell>
          <table:table-cell table:style-name="ce11" office:value-type="string" calcext:value-type="string">
            <text:p>第５弾ブースターパック</text:p>
          </table:table-cell>
          <table:table-cell table:style-name="ce11" table:formula="of:=VLOOKUP([.H441];[$収録番号.$A$1:$収録番号.$B$10];2;0)" office:value-type="float" office:value="55" calcext:value-type="float">
            <text:p>55</text:p>
          </table:table-cell>
          <table:table-cell office:value-type="string" calcext:value-type="string">
            <text:p>R</text:p>
          </table:table-cell>
          <table:table-cell table:style-name="ce11" table:formula="of:=VLOOKUP([.J441];[$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41];[$種類番号.$A$1:$種類番号.$B$4];2;0)" office:value-type="float" office:value="1" calcext:value-type="float">
            <text:p>1</text:p>
          </table:table-cell>
          <table:table-cell office:value-type="string" calcext:value-type="string">
            <text:p>黄</text:p>
          </table:table-cell>
          <table:table-cell table:style-name="ce11" table:formula="of:=VLOOKUP([.N441];[$色番号.$A$1:$色番号.$B$10];2;0)" office:value-type="float" office:value="8" calcext:value-type="float">
            <text:p>8</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4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41];[$特性番号.$A$1:$特性番号.$B$8];2;0);0)" office:value-type="float" office:value="0" calcext:value-type="float">
            <text:p>0</text:p>
          </table:table-cell>
          <table:table-cell office:value-type="string" calcext:value-type="string">
            <text:p>この能力は戦場で効果を発揮する。自分の戦場の「ウォッチャー」を持つイジンは「これは、レベル5以下のイジンにブロックされない」を得る。</text:p>
          </table:table-cell>
          <table:table-cell office:value-type="float" office:value="2500" calcext:value-type="float">
            <text:p>2500</text:p>
          </table:table-cell>
          <table:table-cell office:value-type="string" calcext:value-type="string">
            <text:p>1ドローする</text:p>
          </table:table-cell>
          <table:table-cell table:style-name="ce11" table:formula="of:=IFERROR(VLOOKUP([.$X441];[$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50.png</text:p>
          </table:table-cell>
          <table:table-cell table:style-name="ce11" table:formula="of:=CONCATENATE([$JSON.$A$1];[.$C441];[$JSON.$B$1];[.$E441];[$JSON.$C$1];[.F441];[$JSON.$D$1];[.$G441];[$JSON.$E$1];IF(ISNA([.$T441]);&quot;null&quot;;&quot;&quot;&quot;&quot;&amp;[.$T441]&amp;&quot;&quot;&quot;&quot;);[$JSON.$F$1];[.$V441];[$JSON.$G$1];IF(ISNA([.$X441]);&quot;null&quot;;&quot;&quot;&quot;&quot;&amp;[.$X441]&amp;&quot;&quot;&quot;&quot;);[$JSON.$H$1];[.$AA441];[$JSON.$I$1];[.$I441];[$JSON.$J$1];[.K441];[$JSON.$K$1];[.$M441];[$JSON.$L$1];[.$P441];[$JSON.$M$1];[.$O441];[$JSON.$N$1];[.$S441];[$JSON.$O$1];[.$U441];[$JSON.$P$1];IF(ISNA([.$W441]);&quot;null&quot;;[.$W441]);[$JSON.$Q$1];[.$Y441];[$JSON.$R$1];IF([.$Z441];&quot;true&quot;;&quot;false&quot;);[$JSON.$S$1];[.$A441];[$JSON.$T$1];[.$B441];[$JSON.$U$1])" office:value-type="string" office:string-value="{&quot;id&quot;:&quot;2nd1-50&quot;,&quot;name&quot;:&quot;孫策&quot;,&quot;displayName&quot;:&quot;孫策&quot;,&quot;kana&quot;:&quot;そんさく&quot;,&quot;traitText&quot;:null,&quot;ruleText&quot;:&quot;この能力は戦場で効果を発揮する。自分の戦場の「ウォッチャー」を持つイジンは「これは、レベル5以下のイジンにブロックされない」を得る。&quot;,&quot;legacyText&quot;:&quot;1ドローする&quot;,&quot;imageUrl&quot;:&quot;https://one-draw.jp/ijinden/cardlist/005/card/05_050.png&quot;,&quot;expansion&quot;:55,&quot;rarity&quot;:2,&quot;type&quot;:1,&quot;level&quot;:3,&quot;color&quot;:8,&quot;term&quot;:0,&quot;trait&quot;:0,&quot;power&quot;:2500,&quot;legacy&quot;:4,&quot;anyNumCopies&quot;:false,&quot;orderTable&quot;:440,&quot;orderDeck&quot;:128}," calcext:value-type="string">
            <text:p>{"id":"2nd1-50","name":"孫策","displayName":"孫策","kana":"そんさく","traitText":null,"ruleText":"この能力は戦場で効果を発揮する。自分の戦場の「ウォッチャー」を持つイジンは「これは、レベル5以下のイジンにブロックされない」を得る。","legacyText":"1ドローする","imageUrl":"https://one-draw.jp/ijinden/cardlist/005/card/05_050.png","expansion":55,"rarity":2,"type":1,"level":3,"color":8,"term":0,"trait":0,"power":2500,"legacy":4,"anyNumCopies":false,"orderTable":440,"orderDeck":128},</text:p>
          </table:table-cell>
          <table:table-cell table:number-columns-repeated="16356"/>
        </table:table-row>
        <table:table-row table:style-name="ro2">
          <table:table-cell table:style-name="ce11" office:value-type="float" office:value="441" calcext:value-type="float">
            <text:p>441</text:p>
          </table:table-cell>
          <table:table-cell table:style-name="ce11" office:value-type="float" office:value="225" calcext:value-type="float">
            <text:p>225</text:p>
          </table:table-cell>
          <table:table-cell table:formula="of:=CONCATENATE(&quot;2nd1-&quot;;TEXT([.D442];&quot;0&quot;))" office:value-type="string" office:string-value="2nd1-51" calcext:value-type="string">
            <text:p>2nd1-51</text:p>
          </table:table-cell>
          <table:table-cell office:value-type="float" office:value="51" calcext:value-type="float">
            <text:p>51</text:p>
          </table:table-cell>
          <table:table-cell office:value-type="string" calcext:value-type="string">
            <text:p>三好長慶</text:p>
          </table:table-cell>
          <table:table-cell table:style-name="ce11" table:formula="of:=[.E442]" office:value-type="string" office:string-value="三好長慶" calcext:value-type="string">
            <text:p>三好長慶</text:p>
          </table:table-cell>
          <table:table-cell office:value-type="string" calcext:value-type="string">
            <text:p>みよしながよし</text:p>
          </table:table-cell>
          <table:table-cell table:style-name="ce11" office:value-type="string" calcext:value-type="string">
            <text:p>第５弾ブースターパック</text:p>
          </table:table-cell>
          <table:table-cell table:style-name="ce11" table:formula="of:=VLOOKUP([.H442];[$収録番号.$A$1:$収録番号.$B$10];2;0)" office:value-type="float" office:value="55" calcext:value-type="float">
            <text:p>55</text:p>
          </table:table-cell>
          <table:table-cell office:value-type="string" calcext:value-type="string">
            <text:p>N</text:p>
          </table:table-cell>
          <table:table-cell table:style-name="ce11" table:formula="of:=VLOOKUP([.J442];[$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42];[$種類番号.$A$1:$種類番号.$B$4];2;0)" office:value-type="float" office:value="1" calcext:value-type="float">
            <text:p>1</text:p>
          </table:table-cell>
          <table:table-cell office:value-type="string" calcext:value-type="string">
            <text:p>紫</text:p>
          </table:table-cell>
          <table:table-cell table:style-name="ce11" table:formula="of:=VLOOKUP([.N442];[$色番号.$A$1:$色番号.$B$10];2;0)" office:value-type="float" office:value="16" calcext:value-type="float">
            <text:p>16</text:p>
          </table:table-cell>
          <table:table-cell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42];[$能力語番号.$A$1:$能力語番号.$B$11];2;0);0)" office:value-type="float" office:value="0" calcext:value-type="float">
            <text:p>0</text:p>
          </table:table-cell>
          <table:table-cell office:value-type="string" calcext:value-type="string">
            <text:p>剣術</text:p>
          </table:table-cell>
          <table:table-cell table:style-name="ce11" table:formula="of:=IFERROR(VLOOKUP([.$T442];[$特性番号.$A$1:$特性番号.$B$8];2;0);0)" office:value-type="float" office:value="1" calcext:value-type="float">
            <text:p>1</text:p>
          </table:table-cell>
          <table:table-cell office:value-type="string" calcext:value-type="string">
            <text:p>この能力は、相手の手札のカードが3つ以上なら、戦場で効果を発揮する。これは「ドレイン パワー+3000」を得る。</text:p>
          </table:table-cell>
          <table:table-cell office:value-type="float" office:value="3500" calcext:value-type="float">
            <text:p>3500</text:p>
          </table:table-cell>
          <table:table-cell office:value-type="string" calcext:value-type="string">
            <text:p>1ドローする</text:p>
          </table:table-cell>
          <table:table-cell table:style-name="ce11" table:formula="of:=IFERROR(VLOOKUP([.$X442];[$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51.png</text:p>
          </table:table-cell>
          <table:table-cell table:style-name="ce11" table:formula="of:=CONCATENATE([$JSON.$A$1];[.$C442];[$JSON.$B$1];[.$E442];[$JSON.$C$1];[.F442];[$JSON.$D$1];[.$G442];[$JSON.$E$1];IF(ISNA([.$T442]);&quot;null&quot;;&quot;&quot;&quot;&quot;&amp;[.$T442]&amp;&quot;&quot;&quot;&quot;);[$JSON.$F$1];[.$V442];[$JSON.$G$1];IF(ISNA([.$X442]);&quot;null&quot;;&quot;&quot;&quot;&quot;&amp;[.$X442]&amp;&quot;&quot;&quot;&quot;);[$JSON.$H$1];[.$AA442];[$JSON.$I$1];[.$I442];[$JSON.$J$1];[.K442];[$JSON.$K$1];[.$M442];[$JSON.$L$1];[.$P442];[$JSON.$M$1];[.$O442];[$JSON.$N$1];[.$S442];[$JSON.$O$1];[.$U442];[$JSON.$P$1];IF(ISNA([.$W442]);&quot;null&quot;;[.$W442]);[$JSON.$Q$1];[.$Y442];[$JSON.$R$1];IF([.$Z442];&quot;true&quot;;&quot;false&quot;);[$JSON.$S$1];[.$A442];[$JSON.$T$1];[.$B442];[$JSON.$U$1])" office:value-type="string" office:string-value="{&quot;id&quot;:&quot;2nd1-51&quot;,&quot;name&quot;:&quot;三好長慶&quot;,&quot;displayName&quot;:&quot;三好長慶&quot;,&quot;kana&quot;:&quot;みよしながよし&quot;,&quot;traitText&quot;:&quot;剣術&quot;,&quot;ruleText&quot;:&quot;この能力は、相手の手札のカードが3つ以上なら、戦場で効果を発揮する。これは「ドレイン パワー+3000」を得る。&quot;,&quot;legacyText&quot;:&quot;1ドローする&quot;,&quot;imageUrl&quot;:&quot;https://one-draw.jp/ijinden/cardlist/005/card/05_051.png&quot;,&quot;expansion&quot;:55,&quot;rarity&quot;:1,&quot;type&quot;:1,&quot;level&quot;:5,&quot;color&quot;:16,&quot;term&quot;:0,&quot;trait&quot;:1,&quot;power&quot;:3500,&quot;legacy&quot;:4,&quot;anyNumCopies&quot;:false,&quot;orderTable&quot;:441,&quot;orderDeck&quot;:225}," calcext:value-type="string">
            <text:p>{"id":"2nd1-51","name":"三好長慶","displayName":"三好長慶","kana":"みよしながよし","traitText":"剣術","ruleText":"この能力は、相手の手札のカードが3つ以上なら、戦場で効果を発揮する。これは「ドレイン パワー+3000」を得る。","legacyText":"1ドローする","imageUrl":"https://one-draw.jp/ijinden/cardlist/005/card/05_051.png","expansion":55,"rarity":1,"type":1,"level":5,"color":16,"term":0,"trait":1,"power":3500,"legacy":4,"anyNumCopies":false,"orderTable":441,"orderDeck":225},</text:p>
          </table:table-cell>
          <table:table-cell table:number-columns-repeated="16356"/>
        </table:table-row>
        <table:table-row table:style-name="ro2">
          <table:table-cell table:style-name="ce11" office:value-type="float" office:value="442" calcext:value-type="float">
            <text:p>442</text:p>
          </table:table-cell>
          <table:table-cell table:style-name="ce11" office:value-type="float" office:value="134" calcext:value-type="float">
            <text:p>134</text:p>
          </table:table-cell>
          <table:table-cell table:formula="of:=CONCATENATE(&quot;2nd1-&quot;;TEXT([.D443];&quot;0&quot;))" office:value-type="string" office:string-value="2nd1-52" calcext:value-type="string">
            <text:p>2nd1-52</text:p>
          </table:table-cell>
          <table:table-cell office:value-type="float" office:value="52" calcext:value-type="float">
            <text:p>52</text:p>
          </table:table-cell>
          <table:table-cell office:value-type="string" calcext:value-type="string">
            <text:p>松永久秀</text:p>
          </table:table-cell>
          <table:table-cell table:style-name="ce11" table:formula="of:=[.E443]" office:value-type="string" office:string-value="松永久秀" calcext:value-type="string">
            <text:p>松永久秀</text:p>
          </table:table-cell>
          <table:table-cell office:value-type="string" calcext:value-type="string">
            <text:p>まつながひさひで</text:p>
          </table:table-cell>
          <table:table-cell table:style-name="ce11" office:value-type="string" calcext:value-type="string">
            <text:p>第５弾ブースターパック</text:p>
          </table:table-cell>
          <table:table-cell table:style-name="ce11" table:formula="of:=VLOOKUP([.H443];[$収録番号.$A$1:$収録番号.$B$10];2;0)" office:value-type="float" office:value="55" calcext:value-type="float">
            <text:p>55</text:p>
          </table:table-cell>
          <table:table-cell office:value-type="string" calcext:value-type="string">
            <text:p>R</text:p>
          </table:table-cell>
          <table:table-cell table:style-name="ce11" table:formula="of:=VLOOKUP([.J443];[$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43];[$種類番号.$A$1:$種類番号.$B$4];2;0)" office:value-type="float" office:value="1" calcext:value-type="float">
            <text:p>1</text:p>
          </table:table-cell>
          <table:table-cell office:value-type="string" calcext:value-type="string">
            <text:p>紫</text:p>
          </table:table-cell>
          <table:table-cell table:style-name="ce11" table:formula="of:=VLOOKUP([.N443];[$色番号.$A$1:$色番号.$B$10];2;0)" office:value-type="float" office:value="16" calcext:value-type="float">
            <text:p>16</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43];[$能力語番号.$A$1:$能力語番号.$B$11];2;0);0)" office:value-type="float" office:value="0" calcext:value-type="float">
            <text:p>0</text:p>
          </table:table-cell>
          <table:table-cell office:value-type="string" calcext:value-type="string">
            <text:p>剣術</text:p>
          </table:table-cell>
          <table:table-cell table:style-name="ce11" table:formula="of:=IFERROR(VLOOKUP([.$T443];[$特性番号.$A$1:$特性番号.$B$8];2;0);0)" office:value-type="float" office:value="1" calcext:value-type="float">
            <text:p>1</text:p>
          </table:table-cell>
          <table:table-cell office:value-type="string" calcext:value-type="string">
            <text:p>この能力は、これが寝たとき、自分と相手それぞれの山札の上からカード1つずつを墓地に置いて発動できる。そのカードのレベルが高い方のプレイヤーの戦場のガーディアン1体を手札に戻す。</text:p>
          </table:table-cell>
          <table:table-cell office:value-type="float" office:value="2500" calcext:value-type="float">
            <text:p>2500</text:p>
          </table:table-cell>
          <table:table-cell office:value-type="string" calcext:value-type="string">
            <text:p>1ドローする</text:p>
          </table:table-cell>
          <table:table-cell table:style-name="ce11" table:formula="of:=IFERROR(VLOOKUP([.$X443];[$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52.png</text:p>
          </table:table-cell>
          <table:table-cell table:style-name="ce11" table:formula="of:=CONCATENATE([$JSON.$A$1];[.$C443];[$JSON.$B$1];[.$E443];[$JSON.$C$1];[.F443];[$JSON.$D$1];[.$G443];[$JSON.$E$1];IF(ISNA([.$T443]);&quot;null&quot;;&quot;&quot;&quot;&quot;&amp;[.$T443]&amp;&quot;&quot;&quot;&quot;);[$JSON.$F$1];[.$V443];[$JSON.$G$1];IF(ISNA([.$X443]);&quot;null&quot;;&quot;&quot;&quot;&quot;&amp;[.$X443]&amp;&quot;&quot;&quot;&quot;);[$JSON.$H$1];[.$AA443];[$JSON.$I$1];[.$I443];[$JSON.$J$1];[.K443];[$JSON.$K$1];[.$M443];[$JSON.$L$1];[.$P443];[$JSON.$M$1];[.$O443];[$JSON.$N$1];[.$S443];[$JSON.$O$1];[.$U443];[$JSON.$P$1];IF(ISNA([.$W443]);&quot;null&quot;;[.$W443]);[$JSON.$Q$1];[.$Y443];[$JSON.$R$1];IF([.$Z443];&quot;true&quot;;&quot;false&quot;);[$JSON.$S$1];[.$A443];[$JSON.$T$1];[.$B443];[$JSON.$U$1])" office:value-type="string" office:string-value="{&quot;id&quot;:&quot;2nd1-52&quot;,&quot;name&quot;:&quot;松永久秀&quot;,&quot;displayName&quot;:&quot;松永久秀&quot;,&quot;kana&quot;:&quot;まつながひさひで&quot;,&quot;traitText&quot;:&quot;剣術&quot;,&quot;ruleText&quot;:&quot;この能力は、これが寝たとき、自分と相手それぞれの山札の上からカード1つずつを墓地に置いて発動できる。そのカードのレベルが高い方のプレイヤーの戦場のガーディアン1体を手札に戻す。&quot;,&quot;legacyText&quot;:&quot;1ドローする&quot;,&quot;imageUrl&quot;:&quot;https://one-draw.jp/ijinden/cardlist/005/card/05_052.png&quot;,&quot;expansion&quot;:55,&quot;rarity&quot;:2,&quot;type&quot;:1,&quot;level&quot;:3,&quot;color&quot;:16,&quot;term&quot;:0,&quot;trait&quot;:1,&quot;power&quot;:2500,&quot;legacy&quot;:4,&quot;anyNumCopies&quot;:false,&quot;orderTable&quot;:442,&quot;orderDeck&quot;:134}," calcext:value-type="string">
            <text:p>{"id":"2nd1-52","name":"松永久秀","displayName":"松永久秀","kana":"まつながひさひで","traitText":"剣術","ruleText":"この能力は、これが寝たとき、自分と相手それぞれの山札の上からカード1つずつを墓地に置いて発動できる。そのカードのレベルが高い方のプレイヤーの戦場のガーディアン1体を手札に戻す。","legacyText":"1ドローする","imageUrl":"https://one-draw.jp/ijinden/cardlist/005/card/05_052.png","expansion":55,"rarity":2,"type":1,"level":3,"color":16,"term":0,"trait":1,"power":2500,"legacy":4,"anyNumCopies":false,"orderTable":442,"orderDeck":134},</text:p>
          </table:table-cell>
          <table:table-cell table:number-columns-repeated="16356"/>
        </table:table-row>
        <table:table-row table:style-name="ro2">
          <table:table-cell table:style-name="ce11" office:value-type="float" office:value="443" calcext:value-type="float">
            <text:p>443</text:p>
          </table:table-cell>
          <table:table-cell table:style-name="ce11" office:value-type="float" office:value="257" calcext:value-type="float">
            <text:p>257</text:p>
          </table:table-cell>
          <table:table-cell table:formula="of:=CONCATENATE(&quot;2nd1-&quot;;TEXT([.D444];&quot;0&quot;))" office:value-type="string" office:string-value="2nd1-53" calcext:value-type="string">
            <text:p>2nd1-53</text:p>
          </table:table-cell>
          <table:table-cell office:value-type="float" office:value="53" calcext:value-type="float">
            <text:p>53</text:p>
          </table:table-cell>
          <table:table-cell office:value-type="string" calcext:value-type="string">
            <text:p>大隈重信</text:p>
          </table:table-cell>
          <table:table-cell table:style-name="ce11" table:formula="of:=[.E444]" office:value-type="string" office:string-value="大隈重信" calcext:value-type="string">
            <text:p>大隈重信</text:p>
          </table:table-cell>
          <table:table-cell office:value-type="string" calcext:value-type="string">
            <text:p>おおくましげのぶ</text:p>
          </table:table-cell>
          <table:table-cell table:style-name="ce11" office:value-type="string" calcext:value-type="string">
            <text:p>第５弾ブースターパック</text:p>
          </table:table-cell>
          <table:table-cell table:style-name="ce11" table:formula="of:=VLOOKUP([.H444];[$収録番号.$A$1:$収録番号.$B$10];2;0)" office:value-type="float" office:value="55" calcext:value-type="float">
            <text:p>55</text:p>
          </table:table-cell>
          <table:table-cell office:value-type="string" calcext:value-type="string">
            <text:p>N</text:p>
          </table:table-cell>
          <table:table-cell table:style-name="ce11" table:formula="of:=VLOOKUP([.J444];[$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44];[$種類番号.$A$1:$種類番号.$B$4];2;0)" office:value-type="float" office:value="1" calcext:value-type="float">
            <text:p>1</text:p>
          </table:table-cell>
          <table:table-cell office:value-type="string" calcext:value-type="string">
            <text:p>紫</text:p>
          </table:table-cell>
          <table:table-cell table:style-name="ce11" table:formula="of:=VLOOKUP([.N444];[$色番号.$A$1:$色番号.$B$10];2;0)" office:value-type="float" office:value="16" calcext:value-type="float">
            <text:p>16</text:p>
          </table:table-cell>
          <table:table-cell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4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44];[$特性番号.$A$1:$特性番号.$B$8];2;0);0)" office:value-type="float" office:value="0" calcext:value-type="float">
            <text:p>0</text:p>
          </table:table-cell>
          <table:table-cell office:value-type="string" calcext:value-type="string">
            <text:p>この能力は、これが破壊されたとき、自分の墓地のマホウ1つか2つを指定して発動できる。そのマホウすべてを手札に戻して、これを破壊されていない状態にする。</text:p>
          </table:table-cell>
          <table:table-cell office:value-type="float" office:value="6000" calcext:value-type="float">
            <text:p>6000</text:p>
          </table:table-cell>
          <table:table-cell table:style-name="ce25" table:formula="of:=NA()" office:value-type="string" office:string-value="" calcext:value-type="error">
            <text:p>#N/A</text:p>
          </table:table-cell>
          <table:table-cell table:style-name="ce11" table:formula="of:=IFERROR(VLOOKUP([.$X444];[$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53.png</text:p>
          </table:table-cell>
          <table:table-cell table:style-name="ce11" table:formula="of:=CONCATENATE([$JSON.$A$1];[.$C444];[$JSON.$B$1];[.$E444];[$JSON.$C$1];[.F444];[$JSON.$D$1];[.$G444];[$JSON.$E$1];IF(ISNA([.$T444]);&quot;null&quot;;&quot;&quot;&quot;&quot;&amp;[.$T444]&amp;&quot;&quot;&quot;&quot;);[$JSON.$F$1];[.$V444];[$JSON.$G$1];IF(ISNA([.$X444]);&quot;null&quot;;&quot;&quot;&quot;&quot;&amp;[.$X444]&amp;&quot;&quot;&quot;&quot;);[$JSON.$H$1];[.$AA444];[$JSON.$I$1];[.$I444];[$JSON.$J$1];[.K444];[$JSON.$K$1];[.$M444];[$JSON.$L$1];[.$P444];[$JSON.$M$1];[.$O444];[$JSON.$N$1];[.$S444];[$JSON.$O$1];[.$U444];[$JSON.$P$1];IF(ISNA([.$W444]);&quot;null&quot;;[.$W444]);[$JSON.$Q$1];[.$Y444];[$JSON.$R$1];IF([.$Z444];&quot;true&quot;;&quot;false&quot;);[$JSON.$S$1];[.$A444];[$JSON.$T$1];[.$B444];[$JSON.$U$1])" office:value-type="string" office:string-value="{&quot;id&quot;:&quot;2nd1-53&quot;,&quot;name&quot;:&quot;大隈重信&quot;,&quot;displayName&quot;:&quot;大隈重信&quot;,&quot;kana&quot;:&quot;おおくましげのぶ&quot;,&quot;traitText&quot;:null,&quot;ruleText&quot;:&quot;この能力は、これが破壊されたとき、自分の墓地のマホウ1つか2つを指定して発動できる。そのマホウすべてを手札に戻して、これを破壊されていない状態にする。&quot;,&quot;legacyText&quot;:null,&quot;imageUrl&quot;:&quot;https://one-draw.jp/ijinden/cardlist/005/card/05_053.png&quot;,&quot;expansion&quot;:55,&quot;rarity&quot;:1,&quot;type&quot;:1,&quot;level&quot;:6,&quot;color&quot;:16,&quot;term&quot;:0,&quot;trait&quot;:0,&quot;power&quot;:6000,&quot;legacy&quot;:0,&quot;anyNumCopies&quot;:false,&quot;orderTable&quot;:443,&quot;orderDeck&quot;:257}," calcext:value-type="string">
            <text:p>{"id":"2nd1-53","name":"大隈重信","displayName":"大隈重信","kana":"おおくましげのぶ","traitText":null,"ruleText":"この能力は、これが破壊されたとき、自分の墓地のマホウ1つか2つを指定して発動できる。そのマホウすべてを手札に戻して、これを破壊されていない状態にする。","legacyText":null,"imageUrl":"https://one-draw.jp/ijinden/cardlist/005/card/05_053.png","expansion":55,"rarity":1,"type":1,"level":6,"color":16,"term":0,"trait":0,"power":6000,"legacy":0,"anyNumCopies":false,"orderTable":443,"orderDeck":257},</text:p>
          </table:table-cell>
          <table:table-cell table:number-columns-repeated="16356"/>
        </table:table-row>
        <table:table-row table:style-name="ro2">
          <table:table-cell table:style-name="ce11" office:value-type="float" office:value="444" calcext:value-type="float">
            <text:p>444</text:p>
          </table:table-cell>
          <table:table-cell table:style-name="ce11" office:value-type="float" office:value="80" calcext:value-type="float">
            <text:p>80</text:p>
          </table:table-cell>
          <table:table-cell table:formula="of:=CONCATENATE(&quot;2nd1-&quot;;TEXT([.D445];&quot;0&quot;))" office:value-type="string" office:string-value="2nd1-54" calcext:value-type="string">
            <text:p>2nd1-54</text:p>
          </table:table-cell>
          <table:table-cell office:value-type="float" office:value="54" calcext:value-type="float">
            <text:p>54</text:p>
          </table:table-cell>
          <table:table-cell office:value-type="string" calcext:value-type="string">
            <text:p>陸奥宗光</text:p>
          </table:table-cell>
          <table:table-cell table:style-name="ce11" table:formula="of:=[.E445]" office:value-type="string" office:string-value="陸奥宗光" calcext:value-type="string">
            <text:p>陸奥宗光</text:p>
          </table:table-cell>
          <table:table-cell office:value-type="string" calcext:value-type="string">
            <text:p>むつむねみつ</text:p>
          </table:table-cell>
          <table:table-cell table:style-name="ce11" office:value-type="string" calcext:value-type="string">
            <text:p>第５弾ブースターパック</text:p>
          </table:table-cell>
          <table:table-cell table:style-name="ce11" table:formula="of:=VLOOKUP([.H445];[$収録番号.$A$1:$収録番号.$B$10];2;0)" office:value-type="float" office:value="55" calcext:value-type="float">
            <text:p>55</text:p>
          </table:table-cell>
          <table:table-cell office:value-type="string" calcext:value-type="string">
            <text:p>N</text:p>
          </table:table-cell>
          <table:table-cell table:style-name="ce11" table:formula="of:=VLOOKUP([.J445];[$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45];[$種類番号.$A$1:$種類番号.$B$4];2;0)" office:value-type="float" office:value="1" calcext:value-type="float">
            <text:p>1</text:p>
          </table:table-cell>
          <table:table-cell office:value-type="string" calcext:value-type="string">
            <text:p>紫</text:p>
          </table:table-cell>
          <table:table-cell table:style-name="ce11" table:formula="of:=VLOOKUP([.N445];[$色番号.$A$1:$色番号.$B$10];2;0)" office:value-type="float" office:value="16" calcext:value-type="float">
            <text:p>16</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4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45];[$特性番号.$A$1:$特性番号.$B$8];2;0);0)" office:value-type="float" office:value="0" calcext:value-type="float">
            <text:p>0</text:p>
          </table:table-cell>
          <table:table-cell office:value-type="string" calcext:value-type="string">
            <text:p>この能力は、自分のターンに戦場で効果を発揮する。これは「ドレイン」を得る。</text:p>
          </table:table-cell>
          <table:table-cell office:value-type="float" office:value="1000" calcext:value-type="float">
            <text:p>1000</text:p>
          </table:table-cell>
          <table:table-cell office:value-type="string" calcext:value-type="string">
            <text:p>1ドローする</text:p>
          </table:table-cell>
          <table:table-cell table:style-name="ce11" table:formula="of:=IFERROR(VLOOKUP([.$X445];[$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54.png</text:p>
          </table:table-cell>
          <table:table-cell table:style-name="ce11" table:formula="of:=CONCATENATE([$JSON.$A$1];[.$C445];[$JSON.$B$1];[.$E445];[$JSON.$C$1];[.F445];[$JSON.$D$1];[.$G445];[$JSON.$E$1];IF(ISNA([.$T445]);&quot;null&quot;;&quot;&quot;&quot;&quot;&amp;[.$T445]&amp;&quot;&quot;&quot;&quot;);[$JSON.$F$1];[.$V445];[$JSON.$G$1];IF(ISNA([.$X445]);&quot;null&quot;;&quot;&quot;&quot;&quot;&amp;[.$X445]&amp;&quot;&quot;&quot;&quot;);[$JSON.$H$1];[.$AA445];[$JSON.$I$1];[.$I445];[$JSON.$J$1];[.K445];[$JSON.$K$1];[.$M445];[$JSON.$L$1];[.$P445];[$JSON.$M$1];[.$O445];[$JSON.$N$1];[.$S445];[$JSON.$O$1];[.$U445];[$JSON.$P$1];IF(ISNA([.$W445]);&quot;null&quot;;[.$W445]);[$JSON.$Q$1];[.$Y445];[$JSON.$R$1];IF([.$Z445];&quot;true&quot;;&quot;false&quot;);[$JSON.$S$1];[.$A445];[$JSON.$T$1];[.$B445];[$JSON.$U$1])" office:value-type="string" office:string-value="{&quot;id&quot;:&quot;2nd1-54&quot;,&quot;name&quot;:&quot;陸奥宗光&quot;,&quot;displayName&quot;:&quot;陸奥宗光&quot;,&quot;kana&quot;:&quot;むつむねみつ&quot;,&quot;traitText&quot;:null,&quot;ruleText&quot;:&quot;この能力は、自分のターンに戦場で効果を発揮する。これは「ドレイン」を得る。&quot;,&quot;legacyText&quot;:&quot;1ドローする&quot;,&quot;imageUrl&quot;:&quot;https://one-draw.jp/ijinden/cardlist/005/card/05_054.png&quot;,&quot;expansion&quot;:55,&quot;rarity&quot;:1,&quot;type&quot;:1,&quot;level&quot;:2,&quot;color&quot;:16,&quot;term&quot;:0,&quot;trait&quot;:0,&quot;power&quot;:1000,&quot;legacy&quot;:4,&quot;anyNumCopies&quot;:false,&quot;orderTable&quot;:444,&quot;orderDeck&quot;:80}," calcext:value-type="string">
            <text:p>{"id":"2nd1-54","name":"陸奥宗光","displayName":"陸奥宗光","kana":"むつむねみつ","traitText":null,"ruleText":"この能力は、自分のターンに戦場で効果を発揮する。これは「ドレイン」を得る。","legacyText":"1ドローする","imageUrl":"https://one-draw.jp/ijinden/cardlist/005/card/05_054.png","expansion":55,"rarity":1,"type":1,"level":2,"color":16,"term":0,"trait":0,"power":1000,"legacy":4,"anyNumCopies":false,"orderTable":444,"orderDeck":80},</text:p>
          </table:table-cell>
          <table:table-cell table:number-columns-repeated="16356"/>
        </table:table-row>
        <table:table-row table:style-name="ro2">
          <table:table-cell table:style-name="ce11" office:value-type="float" office:value="445" calcext:value-type="float">
            <text:p>445</text:p>
          </table:table-cell>
          <table:table-cell table:style-name="ce11" office:value-type="float" office:value="29" calcext:value-type="float">
            <text:p>29</text:p>
          </table:table-cell>
          <table:table-cell table:formula="of:=CONCATENATE(&quot;2nd1-&quot;;TEXT([.D446];&quot;0&quot;))" office:value-type="string" office:string-value="2nd1-55" calcext:value-type="string">
            <text:p>2nd1-55</text:p>
          </table:table-cell>
          <table:table-cell office:value-type="float" office:value="55" calcext:value-type="float">
            <text:p>55</text:p>
          </table:table-cell>
          <table:table-cell office:value-type="string" calcext:value-type="string">
            <text:p>小村寿太郎</text:p>
          </table:table-cell>
          <table:table-cell table:style-name="ce11" table:formula="of:=[.E446]" office:value-type="string" office:string-value="小村寿太郎" calcext:value-type="string">
            <text:p>小村寿太郎</text:p>
          </table:table-cell>
          <table:table-cell office:value-type="string" calcext:value-type="string">
            <text:p>こむらじゅたろう</text:p>
          </table:table-cell>
          <table:table-cell table:style-name="ce11" office:value-type="string" calcext:value-type="string">
            <text:p>第５弾ブースターパック</text:p>
          </table:table-cell>
          <table:table-cell table:style-name="ce11" table:formula="of:=VLOOKUP([.H446];[$収録番号.$A$1:$収録番号.$B$10];2;0)" office:value-type="float" office:value="55" calcext:value-type="float">
            <text:p>55</text:p>
          </table:table-cell>
          <table:table-cell office:value-type="string" calcext:value-type="string">
            <text:p>N</text:p>
          </table:table-cell>
          <table:table-cell table:style-name="ce11" table:formula="of:=VLOOKUP([.J446];[$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46];[$種類番号.$A$1:$種類番号.$B$4];2;0)" office:value-type="float" office:value="1" calcext:value-type="float">
            <text:p>1</text:p>
          </table:table-cell>
          <table:table-cell office:value-type="string" calcext:value-type="string">
            <text:p>紫</text:p>
          </table:table-cell>
          <table:table-cell table:style-name="ce11" table:formula="of:=VLOOKUP([.N446];[$色番号.$A$1:$色番号.$B$10];2;0)" office:value-type="float" office:value="16" calcext:value-type="float">
            <text:p>16</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4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46];[$特性番号.$A$1:$特性番号.$B$8];2;0);0)" office:value-type="float" office:value="0" calcext:value-type="float">
            <text:p>0</text:p>
          </table:table-cell>
          <table:table-cell office:value-type="string" calcext:value-type="string">
            <text:p>この能力は、これが戦場に置かれたときに発動する。自分の戦場のガーディアン1体を手札に戻す。</text:p>
          </table:table-cell>
          <table:table-cell office:value-type="float" office:value="1000" calcext:value-type="float">
            <text:p>1000</text:p>
          </table:table-cell>
          <table:table-cell office:value-type="string" calcext:value-type="string">
            <text:p>1ドローする</text:p>
          </table:table-cell>
          <table:table-cell table:style-name="ce11" table:formula="of:=IFERROR(VLOOKUP([.$X446];[$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055.png</text:p>
          </table:table-cell>
          <table:table-cell table:style-name="ce11" table:formula="of:=CONCATENATE([$JSON.$A$1];[.$C446];[$JSON.$B$1];[.$E446];[$JSON.$C$1];[.F446];[$JSON.$D$1];[.$G446];[$JSON.$E$1];IF(ISNA([.$T446]);&quot;null&quot;;&quot;&quot;&quot;&quot;&amp;[.$T446]&amp;&quot;&quot;&quot;&quot;);[$JSON.$F$1];[.$V446];[$JSON.$G$1];IF(ISNA([.$X446]);&quot;null&quot;;&quot;&quot;&quot;&quot;&amp;[.$X446]&amp;&quot;&quot;&quot;&quot;);[$JSON.$H$1];[.$AA446];[$JSON.$I$1];[.$I446];[$JSON.$J$1];[.K446];[$JSON.$K$1];[.$M446];[$JSON.$L$1];[.$P446];[$JSON.$M$1];[.$O446];[$JSON.$N$1];[.$S446];[$JSON.$O$1];[.$U446];[$JSON.$P$1];IF(ISNA([.$W446]);&quot;null&quot;;[.$W446]);[$JSON.$Q$1];[.$Y446];[$JSON.$R$1];IF([.$Z446];&quot;true&quot;;&quot;false&quot;);[$JSON.$S$1];[.$A446];[$JSON.$T$1];[.$B446];[$JSON.$U$1])" office:value-type="string" office:string-value="{&quot;id&quot;:&quot;2nd1-55&quot;,&quot;name&quot;:&quot;小村寿太郎&quot;,&quot;displayName&quot;:&quot;小村寿太郎&quot;,&quot;kana&quot;:&quot;こむらじゅたろう&quot;,&quot;traitText&quot;:null,&quot;ruleText&quot;:&quot;この能力は、これが戦場に置かれたときに発動する。自分の戦場のガーディアン1体を手札に戻す。&quot;,&quot;legacyText&quot;:&quot;1ドローする&quot;,&quot;imageUrl&quot;:&quot;https://one-draw.jp/ijinden/cardlist/005/card/05_055.png&quot;,&quot;expansion&quot;:55,&quot;rarity&quot;:1,&quot;type&quot;:1,&quot;level&quot;:1,&quot;color&quot;:16,&quot;term&quot;:0,&quot;trait&quot;:0,&quot;power&quot;:1000,&quot;legacy&quot;:4,&quot;anyNumCopies&quot;:false,&quot;orderTable&quot;:445,&quot;orderDeck&quot;:29}," calcext:value-type="string">
            <text:p>{"id":"2nd1-55","name":"小村寿太郎","displayName":"小村寿太郎","kana":"こむらじゅたろう","traitText":null,"ruleText":"この能力は、これが戦場に置かれたときに発動する。自分の戦場のガーディアン1体を手札に戻す。","legacyText":"1ドローする","imageUrl":"https://one-draw.jp/ijinden/cardlist/005/card/05_055.png","expansion":55,"rarity":1,"type":1,"level":1,"color":16,"term":0,"trait":0,"power":1000,"legacy":4,"anyNumCopies":false,"orderTable":445,"orderDeck":29},</text:p>
          </table:table-cell>
          <table:table-cell table:number-columns-repeated="16356"/>
        </table:table-row>
        <table:table-row table:style-name="ro2">
          <table:table-cell table:style-name="ce11" office:value-type="float" office:value="446" calcext:value-type="float">
            <text:p>446</text:p>
          </table:table-cell>
          <table:table-cell table:style-name="ce11" office:value-type="float" office:value="180" calcext:value-type="float">
            <text:p>180</text:p>
          </table:table-cell>
          <table:table-cell table:formula="of:=CONCATENATE(&quot;2nd1-&quot;;TEXT([.D447];&quot;0&quot;))" office:value-type="string" office:string-value="2nd1-56" calcext:value-type="string">
            <text:p>2nd1-56</text:p>
          </table:table-cell>
          <table:table-cell office:value-type="float" office:value="56" calcext:value-type="float">
            <text:p>56</text:p>
          </table:table-cell>
          <table:table-cell office:value-type="string" calcext:value-type="string">
            <text:p>井上馨</text:p>
          </table:table-cell>
          <table:table-cell table:style-name="ce11" table:formula="of:=[.E447]" office:value-type="string" office:string-value="井上馨" calcext:value-type="string">
            <text:p>井上馨</text:p>
          </table:table-cell>
          <table:table-cell office:value-type="string" calcext:value-type="string">
            <text:p>いのうえかおる</text:p>
          </table:table-cell>
          <table:table-cell table:style-name="ce11" office:value-type="string" calcext:value-type="string">
            <text:p>第５弾ブースターパック</text:p>
          </table:table-cell>
          <table:table-cell table:style-name="ce11" table:formula="of:=VLOOKUP([.H447];[$収録番号.$A$1:$収録番号.$B$10];2;0)" office:value-type="float" office:value="55" calcext:value-type="float">
            <text:p>55</text:p>
          </table:table-cell>
          <table:table-cell office:value-type="string" calcext:value-type="string">
            <text:p>N</text:p>
          </table:table-cell>
          <table:table-cell table:style-name="ce11" table:formula="of:=VLOOKUP([.J447];[$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47];[$種類番号.$A$1:$種類番号.$B$4];2;0)" office:value-type="float" office:value="1" calcext:value-type="float">
            <text:p>1</text:p>
          </table:table-cell>
          <table:table-cell office:value-type="string" calcext:value-type="string">
            <text:p>紫</text:p>
          </table:table-cell>
          <table:table-cell table:style-name="ce11" table:formula="of:=VLOOKUP([.N447];[$色番号.$A$1:$色番号.$B$10];2;0)" office:value-type="float" office:value="16" calcext:value-type="float">
            <text:p>16</text:p>
          </table:table-cell>
          <table:table-cell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4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47];[$特性番号.$A$1:$特性番号.$B$8];2;0);0)" office:value-type="float" office:value="0" calcext:value-type="float">
            <text:p>0</text:p>
          </table:table-cell>
          <table:table-cell office:value-type="string" calcext:value-type="string">
            <text:p>この能力は、これが破壊されたときに発動する。相手の山札の上からカード4つを墓地に置く。</text:p>
          </table:table-cell>
          <table:table-cell office:value-type="float" office:value="3000" calcext:value-type="float">
            <text:p>3000</text:p>
          </table:table-cell>
          <table:table-cell table:style-name="ce25" table:formula="of:=NA()" office:value-type="string" office:string-value="" calcext:value-type="error">
            <text:p>#N/A</text:p>
          </table:table-cell>
          <table:table-cell table:style-name="ce11" table:formula="of:=IFERROR(VLOOKUP([.$X447];[$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56.png</text:p>
          </table:table-cell>
          <table:table-cell table:style-name="ce11" table:formula="of:=CONCATENATE([$JSON.$A$1];[.$C447];[$JSON.$B$1];[.$E447];[$JSON.$C$1];[.F447];[$JSON.$D$1];[.$G447];[$JSON.$E$1];IF(ISNA([.$T447]);&quot;null&quot;;&quot;&quot;&quot;&quot;&amp;[.$T447]&amp;&quot;&quot;&quot;&quot;);[$JSON.$F$1];[.$V447];[$JSON.$G$1];IF(ISNA([.$X447]);&quot;null&quot;;&quot;&quot;&quot;&quot;&amp;[.$X447]&amp;&quot;&quot;&quot;&quot;);[$JSON.$H$1];[.$AA447];[$JSON.$I$1];[.$I447];[$JSON.$J$1];[.K447];[$JSON.$K$1];[.$M447];[$JSON.$L$1];[.$P447];[$JSON.$M$1];[.$O447];[$JSON.$N$1];[.$S447];[$JSON.$O$1];[.$U447];[$JSON.$P$1];IF(ISNA([.$W447]);&quot;null&quot;;[.$W447]);[$JSON.$Q$1];[.$Y447];[$JSON.$R$1];IF([.$Z447];&quot;true&quot;;&quot;false&quot;);[$JSON.$S$1];[.$A447];[$JSON.$T$1];[.$B447];[$JSON.$U$1])" office:value-type="string" office:string-value="{&quot;id&quot;:&quot;2nd1-56&quot;,&quot;name&quot;:&quot;井上馨&quot;,&quot;displayName&quot;:&quot;井上馨&quot;,&quot;kana&quot;:&quot;いのうえかおる&quot;,&quot;traitText&quot;:null,&quot;ruleText&quot;:&quot;この能力は、これが破壊されたときに発動する。相手の山札の上からカード4つを墓地に置く。&quot;,&quot;legacyText&quot;:null,&quot;imageUrl&quot;:&quot;https://one-draw.jp/ijinden/cardlist/005/card/05_056.png&quot;,&quot;expansion&quot;:55,&quot;rarity&quot;:1,&quot;type&quot;:1,&quot;level&quot;:4,&quot;color&quot;:16,&quot;term&quot;:0,&quot;trait&quot;:0,&quot;power&quot;:3000,&quot;legacy&quot;:0,&quot;anyNumCopies&quot;:false,&quot;orderTable&quot;:446,&quot;orderDeck&quot;:180}," calcext:value-type="string">
            <text:p>{"id":"2nd1-56","name":"井上馨","displayName":"井上馨","kana":"いのうえかおる","traitText":null,"ruleText":"この能力は、これが破壊されたときに発動する。相手の山札の上からカード4つを墓地に置く。","legacyText":null,"imageUrl":"https://one-draw.jp/ijinden/cardlist/005/card/05_056.png","expansion":55,"rarity":1,"type":1,"level":4,"color":16,"term":0,"trait":0,"power":3000,"legacy":0,"anyNumCopies":false,"orderTable":446,"orderDeck":180},</text:p>
          </table:table-cell>
          <table:table-cell table:number-columns-repeated="16356"/>
        </table:table-row>
        <table:table-row table:style-name="ro2">
          <table:table-cell table:style-name="ce11" office:value-type="float" office:value="447" calcext:value-type="float">
            <text:p>447</text:p>
          </table:table-cell>
          <table:table-cell table:style-name="ce11" office:value-type="float" office:value="226" calcext:value-type="float">
            <text:p>226</text:p>
          </table:table-cell>
          <table:table-cell table:formula="of:=CONCATENATE(&quot;2nd1-&quot;;TEXT([.D448];&quot;0&quot;))" office:value-type="string" office:string-value="2nd1-57" calcext:value-type="string">
            <text:p>2nd1-57</text:p>
          </table:table-cell>
          <table:table-cell office:value-type="float" office:value="57" calcext:value-type="float">
            <text:p>57</text:p>
          </table:table-cell>
          <table:table-cell office:value-type="string" calcext:value-type="string">
            <text:p>中岡慎太郎</text:p>
          </table:table-cell>
          <table:table-cell table:style-name="ce11" table:formula="of:=[.E448]" office:value-type="string" office:string-value="中岡慎太郎" calcext:value-type="string">
            <text:p>中岡慎太郎</text:p>
          </table:table-cell>
          <table:table-cell office:value-type="string" calcext:value-type="string">
            <text:p>なかおかしんたろう</text:p>
          </table:table-cell>
          <table:table-cell table:style-name="ce11" office:value-type="string" calcext:value-type="string">
            <text:p>第５弾ブースターパック</text:p>
          </table:table-cell>
          <table:table-cell table:style-name="ce11" table:formula="of:=VLOOKUP([.H448];[$収録番号.$A$1:$収録番号.$B$10];2;0)" office:value-type="float" office:value="55" calcext:value-type="float">
            <text:p>55</text:p>
          </table:table-cell>
          <table:table-cell office:value-type="string" calcext:value-type="string">
            <text:p>R</text:p>
          </table:table-cell>
          <table:table-cell table:style-name="ce11" table:formula="of:=VLOOKUP([.J448];[$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48];[$種類番号.$A$1:$種類番号.$B$4];2;0)" office:value-type="float" office:value="1" calcext:value-type="float">
            <text:p>1</text:p>
          </table:table-cell>
          <table:table-cell office:value-type="string" calcext:value-type="string">
            <text:p>紫</text:p>
          </table:table-cell>
          <table:table-cell table:style-name="ce11" table:formula="of:=VLOOKUP([.N448];[$色番号.$A$1:$色番号.$B$10];2;0)" office:value-type="float" office:value="16" calcext:value-type="float">
            <text:p>16</text:p>
          </table:table-cell>
          <table:table-cell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4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48];[$特性番号.$A$1:$特性番号.$B$8];2;0);0)" office:value-type="float" office:value="0" calcext:value-type="float">
            <text:p>0</text:p>
          </table:table-cell>
          <table:table-cell office:value-type="string" calcext:value-type="string">
            <text:p>この能力は、自分の戦場にガーディアンが2体以上いるなら、自分のエンドフェイズが開始したときに発動する。これを破壊して、自分か相手の戦場のイジン1体を破壊する。</text:p>
          </table:table-cell>
          <table:table-cell office:value-type="float" office:value="5000" calcext:value-type="float">
            <text:p>5000</text:p>
          </table:table-cell>
          <table:table-cell table:style-name="ce25" table:formula="of:=NA()" office:value-type="string" office:string-value="" calcext:value-type="error">
            <text:p>#N/A</text:p>
          </table:table-cell>
          <table:table-cell table:style-name="ce11" table:formula="of:=IFERROR(VLOOKUP([.$X448];[$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57.png</text:p>
          </table:table-cell>
          <table:table-cell table:style-name="ce11" table:formula="of:=CONCATENATE([$JSON.$A$1];[.$C448];[$JSON.$B$1];[.$E448];[$JSON.$C$1];[.F448];[$JSON.$D$1];[.$G448];[$JSON.$E$1];IF(ISNA([.$T448]);&quot;null&quot;;&quot;&quot;&quot;&quot;&amp;[.$T448]&amp;&quot;&quot;&quot;&quot;);[$JSON.$F$1];[.$V448];[$JSON.$G$1];IF(ISNA([.$X448]);&quot;null&quot;;&quot;&quot;&quot;&quot;&amp;[.$X448]&amp;&quot;&quot;&quot;&quot;);[$JSON.$H$1];[.$AA448];[$JSON.$I$1];[.$I448];[$JSON.$J$1];[.K448];[$JSON.$K$1];[.$M448];[$JSON.$L$1];[.$P448];[$JSON.$M$1];[.$O448];[$JSON.$N$1];[.$S448];[$JSON.$O$1];[.$U448];[$JSON.$P$1];IF(ISNA([.$W448]);&quot;null&quot;;[.$W448]);[$JSON.$Q$1];[.$Y448];[$JSON.$R$1];IF([.$Z448];&quot;true&quot;;&quot;false&quot;);[$JSON.$S$1];[.$A448];[$JSON.$T$1];[.$B448];[$JSON.$U$1])" office:value-type="string" office:string-value="{&quot;id&quot;:&quot;2nd1-57&quot;,&quot;name&quot;:&quot;中岡慎太郎&quot;,&quot;displayName&quot;:&quot;中岡慎太郎&quot;,&quot;kana&quot;:&quot;なかおかしんたろう&quot;,&quot;traitText&quot;:null,&quot;ruleText&quot;:&quot;この能力は、自分の戦場にガーディアンが2体以上いるなら、自分のエンドフェイズが開始したときに発動する。これを破壊して、自分か相手の戦場のイジン1体を破壊する。&quot;,&quot;legacyText&quot;:null,&quot;imageUrl&quot;:&quot;https://one-draw.jp/ijinden/cardlist/005/card/05_057.png&quot;,&quot;expansion&quot;:55,&quot;rarity&quot;:2,&quot;type&quot;:1,&quot;level&quot;:5,&quot;color&quot;:16,&quot;term&quot;:0,&quot;trait&quot;:0,&quot;power&quot;:5000,&quot;legacy&quot;:0,&quot;anyNumCopies&quot;:false,&quot;orderTable&quot;:447,&quot;orderDeck&quot;:226}," calcext:value-type="string">
            <text:p>{"id":"2nd1-57","name":"中岡慎太郎","displayName":"中岡慎太郎","kana":"なかおかしんたろう","traitText":null,"ruleText":"この能力は、自分の戦場にガーディアンが2体以上いるなら、自分のエンドフェイズが開始したときに発動する。これを破壊して、自分か相手の戦場のイジン1体を破壊する。","legacyText":null,"imageUrl":"https://one-draw.jp/ijinden/cardlist/005/card/05_057.png","expansion":55,"rarity":2,"type":1,"level":5,"color":16,"term":0,"trait":0,"power":5000,"legacy":0,"anyNumCopies":false,"orderTable":447,"orderDeck":226},</text:p>
          </table:table-cell>
          <table:table-cell table:number-columns-repeated="16356"/>
        </table:table-row>
        <table:table-row table:style-name="ro2">
          <table:table-cell table:style-name="ce11" office:value-type="float" office:value="448" calcext:value-type="float">
            <text:p>448</text:p>
          </table:table-cell>
          <table:table-cell table:style-name="ce11" office:value-type="float" office:value="277" calcext:value-type="float">
            <text:p>277</text:p>
          </table:table-cell>
          <table:table-cell table:formula="of:=CONCATENATE(&quot;2nd1-&quot;;TEXT([.D449];&quot;0&quot;))" office:value-type="string" office:string-value="2nd1-58" calcext:value-type="string">
            <text:p>2nd1-58</text:p>
          </table:table-cell>
          <table:table-cell office:value-type="float" office:value="58" calcext:value-type="float">
            <text:p>58</text:p>
          </table:table-cell>
          <table:table-cell office:value-type="string" calcext:value-type="string">
            <text:p>和宮</text:p>
          </table:table-cell>
          <table:table-cell table:style-name="ce11" table:formula="of:=[.E449]" office:value-type="string" office:string-value="和宮" calcext:value-type="string">
            <text:p>和宮</text:p>
          </table:table-cell>
          <table:table-cell office:value-type="string" calcext:value-type="string">
            <text:p>かずのみや</text:p>
          </table:table-cell>
          <table:table-cell table:style-name="ce11" office:value-type="string" calcext:value-type="string">
            <text:p>第５弾ブースターパック</text:p>
          </table:table-cell>
          <table:table-cell table:style-name="ce11" table:formula="of:=VLOOKUP([.H449];[$収録番号.$A$1:$収録番号.$B$10];2;0)" office:value-type="float" office:value="55" calcext:value-type="float">
            <text:p>55</text:p>
          </table:table-cell>
          <table:table-cell office:value-type="string" calcext:value-type="string">
            <text:p>R</text:p>
          </table:table-cell>
          <table:table-cell table:style-name="ce11" table:formula="of:=VLOOKUP([.J449];[$レアリティ番号.$A$1:$レアリティ番号.$B$4];2;0)" office:value-type="float" office:value="2" calcext:value-type="float">
            <text:p>2</text:p>
          </table:table-cell>
          <table:table-cell office:value-type="string" calcext:value-type="string">
            <text:p>イジン</text:p>
          </table:table-cell>
          <table:table-cell table:style-name="ce11" table:formula="of:=VLOOKUP([.L449];[$種類番号.$A$1:$種類番号.$B$4];2;0)" office:value-type="float" office:value="1" calcext:value-type="float">
            <text:p>1</text:p>
          </table:table-cell>
          <table:table-cell office:value-type="string" calcext:value-type="string">
            <text:p>紫</text:p>
          </table:table-cell>
          <table:table-cell table:style-name="ce11" table:formula="of:=VLOOKUP([.N449];[$色番号.$A$1:$色番号.$B$10];2;0)" office:value-type="float" office:value="16" calcext:value-type="float">
            <text:p>16</text:p>
          </table:table-cell>
          <table:table-cell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4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49];[$特性番号.$A$1:$特性番号.$B$8];2;0);0)" office:value-type="float" office:value="0" calcext:value-type="float">
            <text:p>0</text:p>
          </table:table-cell>
          <table:table-cell office:value-type="string" calcext:value-type="string">
            <text:p>この能力は戦場で効果を発揮する。相手は、自分と相手の墓地にあるカードと同じ名前のカードを、手札から使えない。</text:p>
          </table:table-cell>
          <table:table-cell office:value-type="float" office:value="7000" calcext:value-type="float">
            <text:p>7000</text:p>
          </table:table-cell>
          <table:table-cell table:style-name="ce25" table:formula="of:=NA()" office:value-type="string" office:string-value="" calcext:value-type="error">
            <text:p>#N/A</text:p>
          </table:table-cell>
          <table:table-cell table:style-name="ce11" table:formula="of:=IFERROR(VLOOKUP([.$X449];[$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58.png</text:p>
          </table:table-cell>
          <table:table-cell table:style-name="ce11" table:formula="of:=CONCATENATE([$JSON.$A$1];[.$C449];[$JSON.$B$1];[.$E449];[$JSON.$C$1];[.F449];[$JSON.$D$1];[.$G449];[$JSON.$E$1];IF(ISNA([.$T449]);&quot;null&quot;;&quot;&quot;&quot;&quot;&amp;[.$T449]&amp;&quot;&quot;&quot;&quot;);[$JSON.$F$1];[.$V449];[$JSON.$G$1];IF(ISNA([.$X449]);&quot;null&quot;;&quot;&quot;&quot;&quot;&amp;[.$X449]&amp;&quot;&quot;&quot;&quot;);[$JSON.$H$1];[.$AA449];[$JSON.$I$1];[.$I449];[$JSON.$J$1];[.K449];[$JSON.$K$1];[.$M449];[$JSON.$L$1];[.$P449];[$JSON.$M$1];[.$O449];[$JSON.$N$1];[.$S449];[$JSON.$O$1];[.$U449];[$JSON.$P$1];IF(ISNA([.$W449]);&quot;null&quot;;[.$W449]);[$JSON.$Q$1];[.$Y449];[$JSON.$R$1];IF([.$Z449];&quot;true&quot;;&quot;false&quot;);[$JSON.$S$1];[.$A449];[$JSON.$T$1];[.$B449];[$JSON.$U$1])" office:value-type="string" office:string-value="{&quot;id&quot;:&quot;2nd1-58&quot;,&quot;name&quot;:&quot;和宮&quot;,&quot;displayName&quot;:&quot;和宮&quot;,&quot;kana&quot;:&quot;かずのみや&quot;,&quot;traitText&quot;:null,&quot;ruleText&quot;:&quot;この能力は戦場で効果を発揮する。相手は、自分と相手の墓地にあるカードと同じ名前のカードを、手札から使えない。&quot;,&quot;legacyText&quot;:null,&quot;imageUrl&quot;:&quot;https://one-draw.jp/ijinden/cardlist/005/card/05_058.png&quot;,&quot;expansion&quot;:55,&quot;rarity&quot;:2,&quot;type&quot;:1,&quot;level&quot;:7,&quot;color&quot;:16,&quot;term&quot;:0,&quot;trait&quot;:0,&quot;power&quot;:7000,&quot;legacy&quot;:0,&quot;anyNumCopies&quot;:false,&quot;orderTable&quot;:448,&quot;orderDeck&quot;:277}," calcext:value-type="string">
            <text:p>{"id":"2nd1-58","name":"和宮","displayName":"和宮","kana":"かずのみや","traitText":null,"ruleText":"この能力は戦場で効果を発揮する。相手は、自分と相手の墓地にあるカードと同じ名前のカードを、手札から使えない。","legacyText":null,"imageUrl":"https://one-draw.jp/ijinden/cardlist/005/card/05_058.png","expansion":55,"rarity":2,"type":1,"level":7,"color":16,"term":0,"trait":0,"power":7000,"legacy":0,"anyNumCopies":false,"orderTable":448,"orderDeck":277},</text:p>
          </table:table-cell>
          <table:table-cell table:number-columns-repeated="16356"/>
        </table:table-row>
        <table:table-row table:style-name="ro2">
          <table:table-cell table:style-name="ce11" office:value-type="float" office:value="449" calcext:value-type="float">
            <text:p>449</text:p>
          </table:table-cell>
          <table:table-cell table:style-name="ce11" office:value-type="float" office:value="227" calcext:value-type="float">
            <text:p>227</text:p>
          </table:table-cell>
          <table:table-cell table:formula="of:=CONCATENATE(&quot;2nd1-&quot;;TEXT([.D450];&quot;0&quot;))" office:value-type="string" office:string-value="2nd1-59" calcext:value-type="string">
            <text:p>2nd1-59</text:p>
          </table:table-cell>
          <table:table-cell office:value-type="float" office:value="59" calcext:value-type="float">
            <text:p>59</text:p>
          </table:table-cell>
          <table:table-cell office:value-type="string" calcext:value-type="string">
            <text:p>岡田以蔵</text:p>
          </table:table-cell>
          <table:table-cell office:value-type="string" calcext:value-type="string">
            <text:p>岡田以蔵 (第5弾)</text:p>
          </table:table-cell>
          <table:table-cell office:value-type="string" calcext:value-type="string">
            <text:p>おかだいぞう</text:p>
          </table:table-cell>
          <table:table-cell table:style-name="ce11" office:value-type="string" calcext:value-type="string">
            <text:p>第５弾ブースターパック</text:p>
          </table:table-cell>
          <table:table-cell table:style-name="ce11" table:formula="of:=VLOOKUP([.H450];[$収録番号.$A$1:$収録番号.$B$10];2;0)" office:value-type="float" office:value="55" calcext:value-type="float">
            <text:p>55</text:p>
          </table:table-cell>
          <table:table-cell office:value-type="string" calcext:value-type="string">
            <text:p>N</text:p>
          </table:table-cell>
          <table:table-cell table:style-name="ce11" table:formula="of:=VLOOKUP([.J450];[$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50];[$種類番号.$A$1:$種類番号.$B$4];2;0)" office:value-type="float" office:value="1" calcext:value-type="float">
            <text:p>1</text:p>
          </table:table-cell>
          <table:table-cell office:value-type="string" calcext:value-type="string">
            <text:p>紫</text:p>
          </table:table-cell>
          <table:table-cell table:style-name="ce11" table:formula="of:=VLOOKUP([.N450];[$色番号.$A$1:$色番号.$B$10];2;0)" office:value-type="float" office:value="16" calcext:value-type="float">
            <text:p>16</text:p>
          </table:table-cell>
          <table:table-cell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0];[$能力語番号.$A$1:$能力語番号.$B$11];2;0);0)" office:value-type="float" office:value="0" calcext:value-type="float">
            <text:p>0</text:p>
          </table:table-cell>
          <table:table-cell office:value-type="string" calcext:value-type="string">
            <text:p>剣術</text:p>
          </table:table-cell>
          <table:table-cell table:style-name="ce11" table:formula="of:=IFERROR(VLOOKUP([.$T450];[$特性番号.$A$1:$特性番号.$B$8];2;0);0)" office:value-type="float" office:value="1" calcext:value-type="float">
            <text:p>1</text:p>
          </table:table-cell>
          <table:table-cell office:value-type="string" calcext:value-type="string">
            <text:p>この能力は、これのパワーが6000以上なら、これが寝たときに発動する。自分か相手の戦場のイジンかガーディアン1体を破壊する。¶即応¶この能力は戦場で効果を発揮する。これは、相手の墓地のイジン1体につき「パワー+2000」を得る。</text:p>
          </table:table-cell>
          <table:table-cell office:value-type="float" office:value="2000" calcext:value-type="float">
            <text:p>2000</text:p>
          </table:table-cell>
          <table:table-cell table:style-name="ce25" table:formula="of:=NA()" office:value-type="string" office:string-value="" calcext:value-type="error">
            <text:p>#N/A</text:p>
          </table:table-cell>
          <table:table-cell table:style-name="ce11" table:formula="of:=IFERROR(VLOOKUP([.$X450];[$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59.png</text:p>
          </table:table-cell>
          <table:table-cell table:style-name="ce11" table:formula="of:=CONCATENATE([$JSON.$A$1];[.$C450];[$JSON.$B$1];[.$E450];[$JSON.$C$1];[.F450];[$JSON.$D$1];[.$G450];[$JSON.$E$1];IF(ISNA([.$T450]);&quot;null&quot;;&quot;&quot;&quot;&quot;&amp;[.$T450]&amp;&quot;&quot;&quot;&quot;);[$JSON.$F$1];[.$V450];[$JSON.$G$1];IF(ISNA([.$X450]);&quot;null&quot;;&quot;&quot;&quot;&quot;&amp;[.$X450]&amp;&quot;&quot;&quot;&quot;);[$JSON.$H$1];[.$AA450];[$JSON.$I$1];[.$I450];[$JSON.$J$1];[.K450];[$JSON.$K$1];[.$M450];[$JSON.$L$1];[.$P450];[$JSON.$M$1];[.$O450];[$JSON.$N$1];[.$S450];[$JSON.$O$1];[.$U450];[$JSON.$P$1];IF(ISNA([.$W450]);&quot;null&quot;;[.$W450]);[$JSON.$Q$1];[.$Y450];[$JSON.$R$1];IF([.$Z450];&quot;true&quot;;&quot;false&quot;);[$JSON.$S$1];[.$A450];[$JSON.$T$1];[.$B450];[$JSON.$U$1])" office:value-type="string" office:string-value="{&quot;id&quot;:&quot;2nd1-59&quot;,&quot;name&quot;:&quot;岡田以蔵&quot;,&quot;displayName&quot;:&quot;岡田以蔵 (第5弾)&quot;,&quot;kana&quot;:&quot;おかだいぞう&quot;,&quot;traitText&quot;:&quot;剣術&quot;,&quot;ruleText&quot;:&quot;この能力は、これのパワーが6000以上なら、これが寝たときに発動する。自分か相手の戦場のイジンかガーディアン1体を破壊する。¶即応¶この能力は戦場で効果を発揮する。これは、相手の墓地のイジン1体につき「パワー+2000」を得る。&quot;,&quot;legacyText&quot;:null,&quot;imageUrl&quot;:&quot;https://one-draw.jp/ijinden/cardlist/005/card/05_059.png&quot;,&quot;expansion&quot;:55,&quot;rarity&quot;:1,&quot;type&quot;:1,&quot;level&quot;:5,&quot;color&quot;:16,&quot;term&quot;:0,&quot;trait&quot;:1,&quot;power&quot;:2000,&quot;legacy&quot;:0,&quot;anyNumCopies&quot;:false,&quot;orderTable&quot;:449,&quot;orderDeck&quot;:227}," calcext:value-type="string">
            <text:p>{"id":"2nd1-59","name":"岡田以蔵","displayName":"岡田以蔵 (第5弾)","kana":"おかだいぞう","traitText":"剣術","ruleText":"この能力は、これのパワーが6000以上なら、これが寝たときに発動する。自分か相手の戦場のイジンかガーディアン1体を破壊する。¶即応¶この能力は戦場で効果を発揮する。これは、相手の墓地のイジン1体につき「パワー+2000」を得る。","legacyText":null,"imageUrl":"https://one-draw.jp/ijinden/cardlist/005/card/05_059.png","expansion":55,"rarity":1,"type":1,"level":5,"color":16,"term":0,"trait":1,"power":2000,"legacy":0,"anyNumCopies":false,"orderTable":449,"orderDeck":227},</text:p>
          </table:table-cell>
          <table:table-cell table:number-columns-repeated="16356"/>
        </table:table-row>
        <table:table-row table:style-name="ro2">
          <table:table-cell table:style-name="ce11" office:value-type="float" office:value="450" calcext:value-type="float">
            <text:p>450</text:p>
          </table:table-cell>
          <table:table-cell table:style-name="ce11" office:value-type="float" office:value="30" calcext:value-type="float">
            <text:p>30</text:p>
          </table:table-cell>
          <table:table-cell table:formula="of:=CONCATENATE(&quot;2nd1-&quot;;TEXT([.D451];&quot;0&quot;))" office:value-type="string" office:string-value="2nd1-60" calcext:value-type="string">
            <text:p>2nd1-60</text:p>
          </table:table-cell>
          <table:table-cell office:value-type="float" office:value="60" calcext:value-type="float">
            <text:p>60</text:p>
          </table:table-cell>
          <table:table-cell office:value-type="string" calcext:value-type="string">
            <text:p>篤姫</text:p>
          </table:table-cell>
          <table:table-cell office:value-type="string" calcext:value-type="string">
            <text:p>篤姫 (第5弾)</text:p>
          </table:table-cell>
          <table:table-cell office:value-type="string" calcext:value-type="string">
            <text:p>あつひめ</text:p>
          </table:table-cell>
          <table:table-cell table:style-name="ce11" office:value-type="string" calcext:value-type="string">
            <text:p>第５弾ブースターパック</text:p>
          </table:table-cell>
          <table:table-cell table:style-name="ce11" table:formula="of:=VLOOKUP([.H451];[$収録番号.$A$1:$収録番号.$B$10];2;0)" office:value-type="float" office:value="55" calcext:value-type="float">
            <text:p>55</text:p>
          </table:table-cell>
          <table:table-cell office:value-type="string" calcext:value-type="string">
            <text:p>N</text:p>
          </table:table-cell>
          <table:table-cell table:style-name="ce11" table:formula="of:=VLOOKUP([.J451];[$レアリティ番号.$A$1:$レアリティ番号.$B$4];2;0)" office:value-type="float" office:value="1" calcext:value-type="float">
            <text:p>1</text:p>
          </table:table-cell>
          <table:table-cell office:value-type="string" calcext:value-type="string">
            <text:p>イジン</text:p>
          </table:table-cell>
          <table:table-cell table:style-name="ce11" table:formula="of:=VLOOKUP([.L451];[$種類番号.$A$1:$種類番号.$B$4];2;0)" office:value-type="float" office:value="1" calcext:value-type="float">
            <text:p>1</text:p>
          </table:table-cell>
          <table:table-cell office:value-type="string" calcext:value-type="string">
            <text:p>紫</text:p>
          </table:table-cell>
          <table:table-cell table:style-name="ce11" table:formula="of:=VLOOKUP([.N451];[$色番号.$A$1:$色番号.$B$10];2;0)" office:value-type="float" office:value="16" calcext:value-type="float">
            <text:p>16</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51];[$特性番号.$A$1:$特性番号.$B$8];2;0);0)" office:value-type="float" office:value="0" calcext:value-type="float">
            <text:p>0</text:p>
          </table:table-cell>
          <table:table-cell office:value-type="string" calcext:value-type="string">
            <text:p>この能力は、これが戦場に置かれたときに発動する。自分か相手の戦場の裏のカード1つの表を見る。</text:p>
          </table:table-cell>
          <table:table-cell office:value-type="float" office:value="1000" calcext:value-type="float">
            <text:p>1000</text:p>
          </table:table-cell>
          <table:table-cell office:value-type="string" calcext:value-type="string">
            <text:p>魔力化</text:p>
          </table:table-cell>
          <table:table-cell table:style-name="ce11" table:formula="of:=IFERROR(VLOOKUP([.$X451];[$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60.png</text:p>
          </table:table-cell>
          <table:table-cell table:style-name="ce11" table:formula="of:=CONCATENATE([$JSON.$A$1];[.$C451];[$JSON.$B$1];[.$E451];[$JSON.$C$1];[.F451];[$JSON.$D$1];[.$G451];[$JSON.$E$1];IF(ISNA([.$T451]);&quot;null&quot;;&quot;&quot;&quot;&quot;&amp;[.$T451]&amp;&quot;&quot;&quot;&quot;);[$JSON.$F$1];[.$V451];[$JSON.$G$1];IF(ISNA([.$X451]);&quot;null&quot;;&quot;&quot;&quot;&quot;&amp;[.$X451]&amp;&quot;&quot;&quot;&quot;);[$JSON.$H$1];[.$AA451];[$JSON.$I$1];[.$I451];[$JSON.$J$1];[.K451];[$JSON.$K$1];[.$M451];[$JSON.$L$1];[.$P451];[$JSON.$M$1];[.$O451];[$JSON.$N$1];[.$S451];[$JSON.$O$1];[.$U451];[$JSON.$P$1];IF(ISNA([.$W451]);&quot;null&quot;;[.$W451]);[$JSON.$Q$1];[.$Y451];[$JSON.$R$1];IF([.$Z451];&quot;true&quot;;&quot;false&quot;);[$JSON.$S$1];[.$A451];[$JSON.$T$1];[.$B451];[$JSON.$U$1])" office:value-type="string" office:string-value="{&quot;id&quot;:&quot;2nd1-60&quot;,&quot;name&quot;:&quot;篤姫&quot;,&quot;displayName&quot;:&quot;篤姫 (第5弾)&quot;,&quot;kana&quot;:&quot;あつひめ&quot;,&quot;traitText&quot;:null,&quot;ruleText&quot;:&quot;この能力は、これが戦場に置かれたときに発動する。自分か相手の戦場の裏のカード1つの表を見る。&quot;,&quot;legacyText&quot;:&quot;魔力化&quot;,&quot;imageUrl&quot;:&quot;https://one-draw.jp/ijinden/cardlist/005/card/05_060.png&quot;,&quot;expansion&quot;:55,&quot;rarity&quot;:1,&quot;type&quot;:1,&quot;level&quot;:1,&quot;color&quot;:16,&quot;term&quot;:0,&quot;trait&quot;:0,&quot;power&quot;:1000,&quot;legacy&quot;:1,&quot;anyNumCopies&quot;:false,&quot;orderTable&quot;:450,&quot;orderDeck&quot;:30}," calcext:value-type="string">
            <text:p>{"id":"2nd1-60","name":"篤姫","displayName":"篤姫 (第5弾)","kana":"あつひめ","traitText":null,"ruleText":"この能力は、これが戦場に置かれたときに発動する。自分か相手の戦場の裏のカード1つの表を見る。","legacyText":"魔力化","imageUrl":"https://one-draw.jp/ijinden/cardlist/005/card/05_060.png","expansion":55,"rarity":1,"type":1,"level":1,"color":16,"term":0,"trait":0,"power":1000,"legacy":1,"anyNumCopies":false,"orderTable":450,"orderDeck":30},</text:p>
          </table:table-cell>
          <table:table-cell table:number-columns-repeated="16356"/>
        </table:table-row>
        <table:table-row table:style-name="ro2">
          <table:table-cell table:style-name="ce11" office:value-type="float" office:value="451" calcext:value-type="float">
            <text:p>451</text:p>
          </table:table-cell>
          <table:table-cell table:style-name="ce11" office:value-type="float" office:value="332" calcext:value-type="float">
            <text:p>332</text:p>
          </table:table-cell>
          <table:table-cell table:formula="of:=CONCATENATE(&quot;2nd1-&quot;;TEXT([.D452];&quot;0&quot;))" office:value-type="string" office:string-value="2nd1-61" calcext:value-type="string">
            <text:p>2nd1-61</text:p>
          </table:table-cell>
          <table:table-cell office:value-type="float" office:value="61" calcext:value-type="float">
            <text:p>61</text:p>
          </table:table-cell>
          <table:table-cell office:value-type="string" calcext:value-type="string">
            <text:p>風林火山</text:p>
          </table:table-cell>
          <table:table-cell table:style-name="ce11" table:formula="of:=[.E452]" office:value-type="string" office:string-value="風林火山" calcext:value-type="string">
            <text:p>風林火山</text:p>
          </table:table-cell>
          <table:table-cell office:value-type="string" calcext:value-type="string">
            <text:p>ふうりんかざん</text:p>
          </table:table-cell>
          <table:table-cell table:style-name="ce11" office:value-type="string" calcext:value-type="string">
            <text:p>第５弾ブースターパック</text:p>
          </table:table-cell>
          <table:table-cell table:style-name="ce11" table:formula="of:=VLOOKUP([.H452];[$収録番号.$A$1:$収録番号.$B$10];2;0)" office:value-type="float" office:value="55" calcext:value-type="float">
            <text:p>55</text:p>
          </table:table-cell>
          <table:table-cell office:value-type="string" calcext:value-type="string">
            <text:p>N</text:p>
          </table:table-cell>
          <table:table-cell table:style-name="ce11" table:formula="of:=VLOOKUP([.J452];[$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52];[$種類番号.$A$1:$種類番号.$B$4];2;0)" office:value-type="float" office:value="2" calcext:value-type="float">
            <text:p>2</text:p>
          </table:table-cell>
          <table:table-cell office:value-type="string" calcext:value-type="string">
            <text:p>赤</text:p>
          </table:table-cell>
          <table:table-cell table:style-name="ce11" table:formula="of:=VLOOKUP([.N452];[$色番号.$A$1:$色番号.$B$10];2;0)" office:value-type="float" office:value="1" calcext:value-type="float">
            <text:p>1</text:p>
          </table:table-cell>
          <table:table-cell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52];[$特性番号.$A$1:$特性番号.$B$8];2;0);0)" office:value-type="float" office:value="0" calcext:value-type="float">
            <text:p>0</text:p>
          </table:table-cell>
          <table:table-cell office:value-type="string" calcext:value-type="string">
            <text:p>この能力は戦場で効果を発揮する。自分の戦場の「剣術」イジンは「勝鬨 - この能力は、これがアタッカーなら、これがバトル解決で勝ったときに発動する。1ドローして、イジン召喚権+1する」を得る。</text:p>
          </table:table-cell>
          <table:table-cell table:style-name="ce25"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452];[$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61.png</text:p>
          </table:table-cell>
          <table:table-cell table:style-name="ce11" table:formula="of:=CONCATENATE([$JSON.$A$1];[.$C452];[$JSON.$B$1];[.$E452];[$JSON.$C$1];[.F452];[$JSON.$D$1];[.$G452];[$JSON.$E$1];IF(ISNA([.$T452]);&quot;null&quot;;&quot;&quot;&quot;&quot;&amp;[.$T452]&amp;&quot;&quot;&quot;&quot;);[$JSON.$F$1];[.$V452];[$JSON.$G$1];IF(ISNA([.$X452]);&quot;null&quot;;&quot;&quot;&quot;&quot;&amp;[.$X452]&amp;&quot;&quot;&quot;&quot;);[$JSON.$H$1];[.$AA452];[$JSON.$I$1];[.$I452];[$JSON.$J$1];[.K452];[$JSON.$K$1];[.$M452];[$JSON.$L$1];[.$P452];[$JSON.$M$1];[.$O452];[$JSON.$N$1];[.$S452];[$JSON.$O$1];[.$U452];[$JSON.$P$1];IF(ISNA([.$W452]);&quot;null&quot;;[.$W452]);[$JSON.$Q$1];[.$Y452];[$JSON.$R$1];IF([.$Z452];&quot;true&quot;;&quot;false&quot;);[$JSON.$S$1];[.$A452];[$JSON.$T$1];[.$B452];[$JSON.$U$1])" office:value-type="string" office:string-value="{&quot;id&quot;:&quot;2nd1-61&quot;,&quot;name&quot;:&quot;風林火山&quot;,&quot;displayName&quot;:&quot;風林火山&quot;,&quot;kana&quot;:&quot;ふうりんかざん&quot;,&quot;traitText&quot;:null,&quot;ruleText&quot;:&quot;この能力は戦場で効果を発揮する。自分の戦場の「剣術」イジンは「勝鬨 - この能力は、これがアタッカーなら、これがバトル解決で勝ったときに発動する。1ドローして、イジン召喚権+1する」を得る。&quot;,&quot;legacyText&quot;:null,&quot;imageUrl&quot;:&quot;https://one-draw.jp/ijinden/cardlist/005/card/05_061.png&quot;,&quot;expansion&quot;:55,&quot;rarity&quot;:1,&quot;type&quot;:2,&quot;level&quot;:4,&quot;color&quot;:1,&quot;term&quot;:0,&quot;trait&quot;:0,&quot;power&quot;:null,&quot;legacy&quot;:0,&quot;anyNumCopies&quot;:false,&quot;orderTable&quot;:451,&quot;orderDeck&quot;:332}," calcext:value-type="string">
            <text:p>{"id":"2nd1-61","name":"風林火山","displayName":"風林火山","kana":"ふうりんかざん","traitText":null,"ruleText":"この能力は戦場で効果を発揮する。自分の戦場の「剣術」イジンは「勝鬨 - この能力は、これがアタッカーなら、これがバトル解決で勝ったときに発動する。1ドローして、イジン召喚権+1する」を得る。","legacyText":null,"imageUrl":"https://one-draw.jp/ijinden/cardlist/005/card/05_061.png","expansion":55,"rarity":1,"type":2,"level":4,"color":1,"term":0,"trait":0,"power":null,"legacy":0,"anyNumCopies":false,"orderTable":451,"orderDeck":332},</text:p>
          </table:table-cell>
          <table:table-cell table:number-columns-repeated="16356"/>
        </table:table-row>
        <table:table-row table:style-name="ro2">
          <table:table-cell table:style-name="ce11" office:value-type="float" office:value="452" calcext:value-type="float">
            <text:p>452</text:p>
          </table:table-cell>
          <table:table-cell table:style-name="ce11" office:value-type="float" office:value="300" calcext:value-type="float">
            <text:p>300</text:p>
          </table:table-cell>
          <table:table-cell table:formula="of:=CONCATENATE(&quot;2nd1-&quot;;TEXT([.D453];&quot;0&quot;))" office:value-type="string" office:string-value="2nd1-62" calcext:value-type="string">
            <text:p>2nd1-62</text:p>
          </table:table-cell>
          <table:table-cell office:value-type="float" office:value="62" calcext:value-type="float">
            <text:p>62</text:p>
          </table:table-cell>
          <table:table-cell office:value-type="string" calcext:value-type="string">
            <text:p>クリスタル・パレス</text:p>
          </table:table-cell>
          <table:table-cell table:style-name="ce11" table:formula="of:=[.E453]" office:value-type="string" office:string-value="クリスタル・パレス" calcext:value-type="string">
            <text:p>クリスタル・パレス</text:p>
          </table:table-cell>
          <table:table-cell office:value-type="string" calcext:value-type="string">
            <text:p>くりすたるぱれす</text:p>
          </table:table-cell>
          <table:table-cell table:style-name="ce11" office:value-type="string" calcext:value-type="string">
            <text:p>第５弾ブースターパック</text:p>
          </table:table-cell>
          <table:table-cell table:style-name="ce11" table:formula="of:=VLOOKUP([.H453];[$収録番号.$A$1:$収録番号.$B$10];2;0)" office:value-type="float" office:value="55" calcext:value-type="float">
            <text:p>55</text:p>
          </table:table-cell>
          <table:table-cell office:value-type="string" calcext:value-type="string">
            <text:p>N</text:p>
          </table:table-cell>
          <table:table-cell table:style-name="ce11" table:formula="of:=VLOOKUP([.J453];[$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53];[$種類番号.$A$1:$種類番号.$B$4];2;0)" office:value-type="float" office:value="2" calcext:value-type="float">
            <text:p>2</text:p>
          </table:table-cell>
          <table:table-cell office:value-type="string" calcext:value-type="string">
            <text:p>赤</text:p>
          </table:table-cell>
          <table:table-cell table:style-name="ce11" table:formula="of:=VLOOKUP([.N453];[$色番号.$A$1:$色番号.$B$10];2;0)" office:value-type="float" office:value="1" calcext:value-type="float">
            <text:p>1</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53];[$特性番号.$A$1:$特性番号.$B$8];2;0);0)" office:value-type="float" office:value="0" calcext:value-type="float">
            <text:p>0</text:p>
          </table:table-cell>
          <table:table-cell office:value-type="string" calcext:value-type="string">
            <text:p>この能力は、相手のエンドフェイズが開始したときに戦場で発動できる。自分の手札のカード2つをすきな順番で山札の下に戻して、1ドローする。</text:p>
          </table:table-cell>
          <table:table-cell table:style-name="ce25" table:formula="of:=NA()" office:value-type="string" office:string-value="" calcext:value-type="error">
            <text:p>#N/A</text:p>
          </table:table-cell>
          <table:table-cell office:value-type="string" calcext:value-type="string">
            <text:p>魔力化</text:p>
          </table:table-cell>
          <table:table-cell table:style-name="ce11" table:formula="of:=IFERROR(VLOOKUP([.$X453];[$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62.png</text:p>
          </table:table-cell>
          <table:table-cell table:style-name="ce11" table:formula="of:=CONCATENATE([$JSON.$A$1];[.$C453];[$JSON.$B$1];[.$E453];[$JSON.$C$1];[.F453];[$JSON.$D$1];[.$G453];[$JSON.$E$1];IF(ISNA([.$T453]);&quot;null&quot;;&quot;&quot;&quot;&quot;&amp;[.$T453]&amp;&quot;&quot;&quot;&quot;);[$JSON.$F$1];[.$V453];[$JSON.$G$1];IF(ISNA([.$X453]);&quot;null&quot;;&quot;&quot;&quot;&quot;&amp;[.$X453]&amp;&quot;&quot;&quot;&quot;);[$JSON.$H$1];[.$AA453];[$JSON.$I$1];[.$I453];[$JSON.$J$1];[.K453];[$JSON.$K$1];[.$M453];[$JSON.$L$1];[.$P453];[$JSON.$M$1];[.$O453];[$JSON.$N$1];[.$S453];[$JSON.$O$1];[.$U453];[$JSON.$P$1];IF(ISNA([.$W453]);&quot;null&quot;;[.$W453]);[$JSON.$Q$1];[.$Y453];[$JSON.$R$1];IF([.$Z453];&quot;true&quot;;&quot;false&quot;);[$JSON.$S$1];[.$A453];[$JSON.$T$1];[.$B453];[$JSON.$U$1])" office:value-type="string" office:string-value="{&quot;id&quot;:&quot;2nd1-62&quot;,&quot;name&quot;:&quot;クリスタル・パレス&quot;,&quot;displayName&quot;:&quot;クリスタル・パレス&quot;,&quot;kana&quot;:&quot;くりすたるぱれす&quot;,&quot;traitText&quot;:null,&quot;ruleText&quot;:&quot;この能力は、相手のエンドフェイズが開始したときに戦場で発動できる。自分の手札のカード2つをすきな順番で山札の下に戻して、1ドローする。&quot;,&quot;legacyText&quot;:&quot;魔力化&quot;,&quot;imageUrl&quot;:&quot;https://one-draw.jp/ijinden/cardlist/005/card/05_062.png&quot;,&quot;expansion&quot;:55,&quot;rarity&quot;:1,&quot;type&quot;:2,&quot;level&quot;:1,&quot;color&quot;:1,&quot;term&quot;:0,&quot;trait&quot;:0,&quot;power&quot;:null,&quot;legacy&quot;:1,&quot;anyNumCopies&quot;:false,&quot;orderTable&quot;:452,&quot;orderDeck&quot;:300}," calcext:value-type="string">
            <text:p>{"id":"2nd1-62","name":"クリスタル・パレス","displayName":"クリスタル・パレス","kana":"くりすたるぱれす","traitText":null,"ruleText":"この能力は、相手のエンドフェイズが開始したときに戦場で発動できる。自分の手札のカード2つをすきな順番で山札の下に戻して、1ドローする。","legacyText":"魔力化","imageUrl":"https://one-draw.jp/ijinden/cardlist/005/card/05_062.png","expansion":55,"rarity":1,"type":2,"level":1,"color":1,"term":0,"trait":0,"power":null,"legacy":1,"anyNumCopies":false,"orderTable":452,"orderDeck":300},</text:p>
          </table:table-cell>
          <table:table-cell table:number-columns-repeated="16356"/>
        </table:table-row>
        <table:table-row table:style-name="ro2">
          <table:table-cell table:style-name="ce11" office:value-type="float" office:value="453" calcext:value-type="float">
            <text:p>453</text:p>
          </table:table-cell>
          <table:table-cell table:style-name="ce11" office:value-type="float" office:value="306" calcext:value-type="float">
            <text:p>306</text:p>
          </table:table-cell>
          <table:table-cell table:formula="of:=CONCATENATE(&quot;2nd1-&quot;;TEXT([.D454];&quot;0&quot;))" office:value-type="string" office:string-value="2nd1-63" calcext:value-type="string">
            <text:p>2nd1-63</text:p>
          </table:table-cell>
          <table:table-cell office:value-type="float" office:value="63" calcext:value-type="float">
            <text:p>63</text:p>
          </table:table-cell>
          <table:table-cell office:value-type="string" calcext:value-type="string">
            <text:p>神剣眠る氏社</text:p>
          </table:table-cell>
          <table:table-cell office:value-type="string" calcext:value-type="string">
            <text:p>神剣眠る氏社 (第5弾)</text:p>
          </table:table-cell>
          <table:table-cell office:value-type="string" calcext:value-type="string">
            <text:p>しんけんねむるうじしゃ</text:p>
          </table:table-cell>
          <table:table-cell table:style-name="ce11" office:value-type="string" calcext:value-type="string">
            <text:p>第５弾ブースターパック</text:p>
          </table:table-cell>
          <table:table-cell table:style-name="ce11" table:formula="of:=VLOOKUP([.H454];[$収録番号.$A$1:$収録番号.$B$10];2;0)" office:value-type="float" office:value="55" calcext:value-type="float">
            <text:p>55</text:p>
          </table:table-cell>
          <table:table-cell office:value-type="string" calcext:value-type="string">
            <text:p>N</text:p>
          </table:table-cell>
          <table:table-cell table:style-name="ce11" table:formula="of:=VLOOKUP([.J454];[$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54];[$種類番号.$A$1:$種類番号.$B$4];2;0)" office:value-type="float" office:value="2" calcext:value-type="float">
            <text:p>2</text:p>
          </table:table-cell>
          <table:table-cell office:value-type="string" calcext:value-type="string">
            <text:p>赤</text:p>
          </table:table-cell>
          <table:table-cell table:style-name="ce11" table:formula="of:=VLOOKUP([.N454];[$色番号.$A$1:$色番号.$B$10];2;0)" office:value-type="float" office:value="1" calcext:value-type="float">
            <text:p>1</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54];[$特性番号.$A$1:$特性番号.$B$8];2;0);0)" office:value-type="float" office:value="0" calcext:value-type="float">
            <text:p>0</text:p>
          </table:table-cell>
          <table:table-cell office:value-type="string" calcext:value-type="string">
            <text:p>この能力は、自分の戦場の赤のイジンが破壊されたときに戦場で発動できる。自分の戦場の破壊されているイジンすべてを裏にして魔力ゾーンに置く。</text:p>
          </table:table-cell>
          <table:table-cell table:style-name="ce25" table:formula="of:=NA()" office:value-type="string" office:string-value="" calcext:value-type="error">
            <text:p>#N/A</text:p>
          </table:table-cell>
          <table:table-cell office:value-type="string" calcext:value-type="string">
            <text:p>魔力化</text:p>
          </table:table-cell>
          <table:table-cell table:style-name="ce11" table:formula="of:=IFERROR(VLOOKUP([.$X454];[$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63.png</text:p>
          </table:table-cell>
          <table:table-cell table:style-name="ce11" table:formula="of:=CONCATENATE([$JSON.$A$1];[.$C454];[$JSON.$B$1];[.$E454];[$JSON.$C$1];[.F454];[$JSON.$D$1];[.$G454];[$JSON.$E$1];IF(ISNA([.$T454]);&quot;null&quot;;&quot;&quot;&quot;&quot;&amp;[.$T454]&amp;&quot;&quot;&quot;&quot;);[$JSON.$F$1];[.$V454];[$JSON.$G$1];IF(ISNA([.$X454]);&quot;null&quot;;&quot;&quot;&quot;&quot;&amp;[.$X454]&amp;&quot;&quot;&quot;&quot;);[$JSON.$H$1];[.$AA454];[$JSON.$I$1];[.$I454];[$JSON.$J$1];[.K454];[$JSON.$K$1];[.$M454];[$JSON.$L$1];[.$P454];[$JSON.$M$1];[.$O454];[$JSON.$N$1];[.$S454];[$JSON.$O$1];[.$U454];[$JSON.$P$1];IF(ISNA([.$W454]);&quot;null&quot;;[.$W454]);[$JSON.$Q$1];[.$Y454];[$JSON.$R$1];IF([.$Z454];&quot;true&quot;;&quot;false&quot;);[$JSON.$S$1];[.$A454];[$JSON.$T$1];[.$B454];[$JSON.$U$1])" office:value-type="string" office:string-value="{&quot;id&quot;:&quot;2nd1-63&quot;,&quot;name&quot;:&quot;神剣眠る氏社&quot;,&quot;displayName&quot;:&quot;神剣眠る氏社 (第5弾)&quot;,&quot;kana&quot;:&quot;しんけんねむるうじしゃ&quot;,&quot;traitText&quot;:null,&quot;ruleText&quot;:&quot;この能力は、自分の戦場の赤のイジンが破壊されたときに戦場で発動できる。自分の戦場の破壊されているイジンすべてを裏にして魔力ゾーンに置く。&quot;,&quot;legacyText&quot;:&quot;魔力化&quot;,&quot;imageUrl&quot;:&quot;https://one-draw.jp/ijinden/cardlist/005/card/05_063.png&quot;,&quot;expansion&quot;:55,&quot;rarity&quot;:1,&quot;type&quot;:2,&quot;level&quot;:2,&quot;color&quot;:1,&quot;term&quot;:0,&quot;trait&quot;:0,&quot;power&quot;:null,&quot;legacy&quot;:1,&quot;anyNumCopies&quot;:false,&quot;orderTable&quot;:453,&quot;orderDeck&quot;:306}," calcext:value-type="string">
            <text:p>{"id":"2nd1-63","name":"神剣眠る氏社","displayName":"神剣眠る氏社 (第5弾)","kana":"しんけんねむるうじしゃ","traitText":null,"ruleText":"この能力は、自分の戦場の赤のイジンが破壊されたときに戦場で発動できる。自分の戦場の破壊されているイジンすべてを裏にして魔力ゾーンに置く。","legacyText":"魔力化","imageUrl":"https://one-draw.jp/ijinden/cardlist/005/card/05_063.png","expansion":55,"rarity":1,"type":2,"level":2,"color":1,"term":0,"trait":0,"power":null,"legacy":1,"anyNumCopies":false,"orderTable":453,"orderDeck":306},</text:p>
          </table:table-cell>
          <table:table-cell table:number-columns-repeated="16356"/>
        </table:table-row>
        <table:table-row table:style-name="ro2">
          <table:table-cell table:style-name="ce11" office:value-type="float" office:value="454" calcext:value-type="float">
            <text:p>454</text:p>
          </table:table-cell>
          <table:table-cell table:style-name="ce11" office:value-type="float" office:value="320" calcext:value-type="float">
            <text:p>320</text:p>
          </table:table-cell>
          <table:table-cell table:formula="of:=CONCATENATE(&quot;2nd1-&quot;;TEXT([.D455];&quot;0&quot;))" office:value-type="string" office:string-value="2nd1-64" calcext:value-type="string">
            <text:p>2nd1-64</text:p>
          </table:table-cell>
          <table:table-cell office:value-type="float" office:value="64" calcext:value-type="float">
            <text:p>64</text:p>
          </table:table-cell>
          <table:table-cell office:value-type="string" calcext:value-type="string">
            <text:p>蘇る青の都</text:p>
          </table:table-cell>
          <table:table-cell table:style-name="ce11" table:formula="of:=[.E455]" office:value-type="string" office:string-value="蘇る青の都" calcext:value-type="string">
            <text:p>蘇る青の都</text:p>
          </table:table-cell>
          <table:table-cell office:value-type="string" calcext:value-type="string">
            <text:p>よみがえるあおのみやこ</text:p>
          </table:table-cell>
          <table:table-cell table:style-name="ce11" office:value-type="string" calcext:value-type="string">
            <text:p>第５弾ブースターパック</text:p>
          </table:table-cell>
          <table:table-cell table:style-name="ce11" table:formula="of:=VLOOKUP([.H455];[$収録番号.$A$1:$収録番号.$B$10];2;0)" office:value-type="float" office:value="55" calcext:value-type="float">
            <text:p>55</text:p>
          </table:table-cell>
          <table:table-cell office:value-type="string" calcext:value-type="string">
            <text:p>N</text:p>
          </table:table-cell>
          <table:table-cell table:style-name="ce11" table:formula="of:=VLOOKUP([.J455];[$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55];[$種類番号.$A$1:$種類番号.$B$4];2;0)" office:value-type="float" office:value="2" calcext:value-type="float">
            <text:p>2</text:p>
          </table:table-cell>
          <table:table-cell office:value-type="string" calcext:value-type="string">
            <text:p>青</text:p>
          </table:table-cell>
          <table:table-cell table:style-name="ce11" table:formula="of:=VLOOKUP([.N455];[$色番号.$A$1:$色番号.$B$10];2;0)" office:value-type="float" office:value="2" calcext:value-type="float">
            <text:p>2</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55];[$特性番号.$A$1:$特性番号.$B$8];2;0);0)" office:value-type="float" office:value="0" calcext:value-type="float">
            <text:p>0</text:p>
          </table:table-cell>
          <table:table-cell office:value-type="string" calcext:value-type="string">
            <text:p>この能力は戦場で効果を発揮する。自分のイジン召喚において、自分の手札の『プレッシャー』能力を持つイジンのレベルは、自分と相手の戦場のイジン1体につき1だけ下がる。</text:p>
          </table:table-cell>
          <table:table-cell table:style-name="ce25" table:formula="of:=NA()" office:value-type="string" office:string-value="" calcext:value-type="error">
            <text:p>#N/A</text:p>
          </table:table-cell>
          <table:table-cell office:value-type="string" calcext:value-type="string">
            <text:p>手札に戻す</text:p>
          </table:table-cell>
          <table:table-cell table:style-name="ce11" table:formula="of:=IFERROR(VLOOKUP([.$X455];[$遺業能力番号.$A$1:$遺業能力番号.$B$9];2;0);0)" office:value-type="float" office:value="5" calcext:value-type="float">
            <text:p>5</text:p>
          </table:table-cell>
          <table:table-cell table:style-name="ce28" office:value-type="boolean" office:boolean-value="false" calcext:value-type="boolean">
            <text:p>FALSE</text:p>
          </table:table-cell>
          <table:table-cell office:value-type="string" calcext:value-type="string">
            <text:p>https://one-draw.jp/ijinden/cardlist/005/card/05_064.png</text:p>
          </table:table-cell>
          <table:table-cell table:style-name="ce11" table:formula="of:=CONCATENATE([$JSON.$A$1];[.$C455];[$JSON.$B$1];[.$E455];[$JSON.$C$1];[.F455];[$JSON.$D$1];[.$G455];[$JSON.$E$1];IF(ISNA([.$T455]);&quot;null&quot;;&quot;&quot;&quot;&quot;&amp;[.$T455]&amp;&quot;&quot;&quot;&quot;);[$JSON.$F$1];[.$V455];[$JSON.$G$1];IF(ISNA([.$X455]);&quot;null&quot;;&quot;&quot;&quot;&quot;&amp;[.$X455]&amp;&quot;&quot;&quot;&quot;);[$JSON.$H$1];[.$AA455];[$JSON.$I$1];[.$I455];[$JSON.$J$1];[.K455];[$JSON.$K$1];[.$M455];[$JSON.$L$1];[.$P455];[$JSON.$M$1];[.$O455];[$JSON.$N$1];[.$S455];[$JSON.$O$1];[.$U455];[$JSON.$P$1];IF(ISNA([.$W455]);&quot;null&quot;;[.$W455]);[$JSON.$Q$1];[.$Y455];[$JSON.$R$1];IF([.$Z455];&quot;true&quot;;&quot;false&quot;);[$JSON.$S$1];[.$A455];[$JSON.$T$1];[.$B455];[$JSON.$U$1])" office:value-type="string" office:string-value="{&quot;id&quot;:&quot;2nd1-64&quot;,&quot;name&quot;:&quot;蘇る青の都&quot;,&quot;displayName&quot;:&quot;蘇る青の都&quot;,&quot;kana&quot;:&quot;よみがえるあおのみやこ&quot;,&quot;traitText&quot;:null,&quot;ruleText&quot;:&quot;この能力は戦場で効果を発揮する。自分のイジン召喚において、自分の手札の『プレッシャー』能力を持つイジンのレベルは、自分と相手の戦場のイジン1体につき1だけ下がる。&quot;,&quot;legacyText&quot;:&quot;手札に戻す&quot;,&quot;imageUrl&quot;:&quot;https://one-draw.jp/ijinden/cardlist/005/card/05_064.png&quot;,&quot;expansion&quot;:55,&quot;rarity&quot;:1,&quot;type&quot;:2,&quot;level&quot;:3,&quot;color&quot;:2,&quot;term&quot;:0,&quot;trait&quot;:0,&quot;power&quot;:null,&quot;legacy&quot;:5,&quot;anyNumCopies&quot;:false,&quot;orderTable&quot;:454,&quot;orderDeck&quot;:320}," calcext:value-type="string">
            <text:p>{"id":"2nd1-64","name":"蘇る青の都","displayName":"蘇る青の都","kana":"よみがえるあおのみやこ","traitText":null,"ruleText":"この能力は戦場で効果を発揮する。自分のイジン召喚において、自分の手札の『プレッシャー』能力を持つイジンのレベルは、自分と相手の戦場のイジン1体につき1だけ下がる。","legacyText":"手札に戻す","imageUrl":"https://one-draw.jp/ijinden/cardlist/005/card/05_064.png","expansion":55,"rarity":1,"type":2,"level":3,"color":2,"term":0,"trait":0,"power":null,"legacy":5,"anyNumCopies":false,"orderTable":454,"orderDeck":320},</text:p>
          </table:table-cell>
          <table:table-cell table:number-columns-repeated="16356"/>
        </table:table-row>
        <table:table-row table:style-name="ro2">
          <table:table-cell table:style-name="ce11" office:value-type="float" office:value="455" calcext:value-type="float">
            <text:p>455</text:p>
          </table:table-cell>
          <table:table-cell table:style-name="ce11" office:value-type="float" office:value="308" calcext:value-type="float">
            <text:p>308</text:p>
          </table:table-cell>
          <table:table-cell table:formula="of:=CONCATENATE(&quot;2nd1-&quot;;TEXT([.D456];&quot;0&quot;))" office:value-type="string" office:string-value="2nd1-65" calcext:value-type="string">
            <text:p>2nd1-65</text:p>
          </table:table-cell>
          <table:table-cell office:value-type="float" office:value="65" calcext:value-type="float">
            <text:p>65</text:p>
          </table:table-cell>
          <table:table-cell office:value-type="string" calcext:value-type="string">
            <text:p>二重螺旋階段</text:p>
          </table:table-cell>
          <table:table-cell table:style-name="ce11" table:formula="of:=[.E456]" office:value-type="string" office:string-value="二重螺旋階段" calcext:value-type="string">
            <text:p>二重螺旋階段</text:p>
          </table:table-cell>
          <table:table-cell office:value-type="string" calcext:value-type="string">
            <text:p>にじゅうらせんかいだん</text:p>
          </table:table-cell>
          <table:table-cell table:style-name="ce11" office:value-type="string" calcext:value-type="string">
            <text:p>第５弾ブースターパック</text:p>
          </table:table-cell>
          <table:table-cell table:style-name="ce11" table:formula="of:=VLOOKUP([.H456];[$収録番号.$A$1:$収録番号.$B$10];2;0)" office:value-type="float" office:value="55" calcext:value-type="float">
            <text:p>55</text:p>
          </table:table-cell>
          <table:table-cell office:value-type="string" calcext:value-type="string">
            <text:p>N</text:p>
          </table:table-cell>
          <table:table-cell table:style-name="ce11" table:formula="of:=VLOOKUP([.J456];[$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56];[$種類番号.$A$1:$種類番号.$B$4];2;0)" office:value-type="float" office:value="2" calcext:value-type="float">
            <text:p>2</text:p>
          </table:table-cell>
          <table:table-cell office:value-type="string" calcext:value-type="string">
            <text:p>青</text:p>
          </table:table-cell>
          <table:table-cell table:style-name="ce11" table:formula="of:=VLOOKUP([.N456];[$色番号.$A$1:$色番号.$B$10];2;0)" office:value-type="float" office:value="2" calcext:value-type="float">
            <text:p>2</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56];[$特性番号.$A$1:$特性番号.$B$8];2;0);0)" office:value-type="float" office:value="0" calcext:value-type="float">
            <text:p>0</text:p>
          </table:table-cell>
          <table:table-cell office:value-type="string" calcext:value-type="string">
            <text:p>この能力は、自分と相手の墓地にマホウが合わせて2つ以上あるなら、戦場で効果を発揮する。自分と相手の手札のマホウは魔力コストが1だけ増える。¶この能力は戦場で効果を発揮する。自分と相手の墓地のマホウは、能力によって墓地を離れない。</text:p>
          </table:table-cell>
          <table:table-cell table:style-name="ce25" table:formula="of:=NA()" office:value-type="string" office:string-value="" calcext:value-type="error">
            <text:p>#N/A</text:p>
          </table:table-cell>
          <table:table-cell office:value-type="string" calcext:value-type="string">
            <text:p>手札に戻す</text:p>
          </table:table-cell>
          <table:table-cell table:style-name="ce11" table:formula="of:=IFERROR(VLOOKUP([.$X456];[$遺業能力番号.$A$1:$遺業能力番号.$B$9];2;0);0)" office:value-type="float" office:value="5" calcext:value-type="float">
            <text:p>5</text:p>
          </table:table-cell>
          <table:table-cell table:style-name="ce28" office:value-type="boolean" office:boolean-value="false" calcext:value-type="boolean">
            <text:p>FALSE</text:p>
          </table:table-cell>
          <table:table-cell office:value-type="string" calcext:value-type="string">
            <text:p>https://one-draw.jp/ijinden/cardlist/005/card/05_065.png</text:p>
          </table:table-cell>
          <table:table-cell table:style-name="ce11" table:formula="of:=CONCATENATE([$JSON.$A$1];[.$C456];[$JSON.$B$1];[.$E456];[$JSON.$C$1];[.F456];[$JSON.$D$1];[.$G456];[$JSON.$E$1];IF(ISNA([.$T456]);&quot;null&quot;;&quot;&quot;&quot;&quot;&amp;[.$T456]&amp;&quot;&quot;&quot;&quot;);[$JSON.$F$1];[.$V456];[$JSON.$G$1];IF(ISNA([.$X456]);&quot;null&quot;;&quot;&quot;&quot;&quot;&amp;[.$X456]&amp;&quot;&quot;&quot;&quot;);[$JSON.$H$1];[.$AA456];[$JSON.$I$1];[.$I456];[$JSON.$J$1];[.K456];[$JSON.$K$1];[.$M456];[$JSON.$L$1];[.$P456];[$JSON.$M$1];[.$O456];[$JSON.$N$1];[.$S456];[$JSON.$O$1];[.$U456];[$JSON.$P$1];IF(ISNA([.$W456]);&quot;null&quot;;[.$W456]);[$JSON.$Q$1];[.$Y456];[$JSON.$R$1];IF([.$Z456];&quot;true&quot;;&quot;false&quot;);[$JSON.$S$1];[.$A456];[$JSON.$T$1];[.$B456];[$JSON.$U$1])" office:value-type="string" office:string-value="{&quot;id&quot;:&quot;2nd1-65&quot;,&quot;name&quot;:&quot;二重螺旋階段&quot;,&quot;displayName&quot;:&quot;二重螺旋階段&quot;,&quot;kana&quot;:&quot;にじゅうらせんかいだん&quot;,&quot;traitText&quot;:null,&quot;ruleText&quot;:&quot;この能力は、自分と相手の墓地にマホウが合わせて2つ以上あるなら、戦場で効果を発揮する。自分と相手の手札のマホウは魔力コストが1だけ増える。¶この能力は戦場で効果を発揮する。自分と相手の墓地のマホウは、能力によって墓地を離れない。&quot;,&quot;legacyText&quot;:&quot;手札に戻す&quot;,&quot;imageUrl&quot;:&quot;https://one-draw.jp/ijinden/cardlist/005/card/05_065.png&quot;,&quot;expansion&quot;:55,&quot;rarity&quot;:1,&quot;type&quot;:2,&quot;level&quot;:2,&quot;color&quot;:2,&quot;term&quot;:0,&quot;trait&quot;:0,&quot;power&quot;:null,&quot;legacy&quot;:5,&quot;anyNumCopies&quot;:false,&quot;orderTable&quot;:455,&quot;orderDeck&quot;:308}," calcext:value-type="string">
            <text:p>{"id":"2nd1-65","name":"二重螺旋階段","displayName":"二重螺旋階段","kana":"にじゅうらせんかいだん","traitText":null,"ruleText":"この能力は、自分と相手の墓地にマホウが合わせて2つ以上あるなら、戦場で効果を発揮する。自分と相手の手札のマホウは魔力コストが1だけ増える。¶この能力は戦場で効果を発揮する。自分と相手の墓地のマホウは、能力によって墓地を離れない。","legacyText":"手札に戻す","imageUrl":"https://one-draw.jp/ijinden/cardlist/005/card/05_065.png","expansion":55,"rarity":1,"type":2,"level":2,"color":2,"term":0,"trait":0,"power":null,"legacy":5,"anyNumCopies":false,"orderTable":455,"orderDeck":308},</text:p>
          </table:table-cell>
          <table:table-cell table:number-columns-repeated="16356"/>
        </table:table-row>
        <table:table-row table:style-name="ro2">
          <table:table-cell table:style-name="ce11" office:value-type="float" office:value="456" calcext:value-type="float">
            <text:p>456</text:p>
          </table:table-cell>
          <table:table-cell table:style-name="ce11" office:value-type="float" office:value="321" calcext:value-type="float">
            <text:p>321</text:p>
          </table:table-cell>
          <table:table-cell table:formula="of:=CONCATENATE(&quot;2nd1-&quot;;TEXT([.D457];&quot;0&quot;))" office:value-type="string" office:string-value="2nd1-66" calcext:value-type="string">
            <text:p>2nd1-66</text:p>
          </table:table-cell>
          <table:table-cell office:value-type="float" office:value="66" calcext:value-type="float">
            <text:p>66</text:p>
          </table:table-cell>
          <table:table-cell office:value-type="string" calcext:value-type="string">
            <text:p>革命の広場</text:p>
          </table:table-cell>
          <table:table-cell office:value-type="string" calcext:value-type="string">
            <text:p>革命の広場 (第5弾)</text:p>
          </table:table-cell>
          <table:table-cell office:value-type="string" calcext:value-type="string">
            <text:p>かくめいのひろば</text:p>
          </table:table-cell>
          <table:table-cell table:style-name="ce11" office:value-type="string" calcext:value-type="string">
            <text:p>第５弾ブースターパック</text:p>
          </table:table-cell>
          <table:table-cell table:style-name="ce11" table:formula="of:=VLOOKUP([.H457];[$収録番号.$A$1:$収録番号.$B$10];2;0)" office:value-type="float" office:value="55" calcext:value-type="float">
            <text:p>55</text:p>
          </table:table-cell>
          <table:table-cell office:value-type="string" calcext:value-type="string">
            <text:p>N</text:p>
          </table:table-cell>
          <table:table-cell table:style-name="ce11" table:formula="of:=VLOOKUP([.J457];[$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57];[$種類番号.$A$1:$種類番号.$B$4];2;0)" office:value-type="float" office:value="2" calcext:value-type="float">
            <text:p>2</text:p>
          </table:table-cell>
          <table:table-cell office:value-type="string" calcext:value-type="string">
            <text:p>青</text:p>
          </table:table-cell>
          <table:table-cell table:style-name="ce11" table:formula="of:=VLOOKUP([.N457];[$色番号.$A$1:$色番号.$B$10];2;0)" office:value-type="float" office:value="2" calcext:value-type="float">
            <text:p>2</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57];[$特性番号.$A$1:$特性番号.$B$8];2;0);0)" office:value-type="float" office:value="0" calcext:value-type="float">
            <text:p>0</text:p>
          </table:table-cell>
          <table:table-cell office:value-type="string" calcext:value-type="string">
            <text:p>この能力は戦場で発動する。自分のメインフェイズが開始したとき、自分の戦場のイジン1体を指定して発動できる。そのイジンを破壊して、2ドローする。</text:p>
          </table:table-cell>
          <table:table-cell table:style-name="ce25" table:formula="of:=NA()" office:value-type="string" office:string-value="" calcext:value-type="error">
            <text:p>#N/A</text:p>
          </table:table-cell>
          <table:table-cell office:value-type="string" calcext:value-type="string">
            <text:p>手札に戻す</text:p>
          </table:table-cell>
          <table:table-cell table:style-name="ce11" table:formula="of:=IFERROR(VLOOKUP([.$X457];[$遺業能力番号.$A$1:$遺業能力番号.$B$9];2;0);0)" office:value-type="float" office:value="5" calcext:value-type="float">
            <text:p>5</text:p>
          </table:table-cell>
          <table:table-cell table:style-name="ce28" office:value-type="boolean" office:boolean-value="false" calcext:value-type="boolean">
            <text:p>FALSE</text:p>
          </table:table-cell>
          <table:table-cell office:value-type="string" calcext:value-type="string">
            <text:p>https://one-draw.jp/ijinden/cardlist/005/card/05_066.png</text:p>
          </table:table-cell>
          <table:table-cell table:style-name="ce11" table:formula="of:=CONCATENATE([$JSON.$A$1];[.$C457];[$JSON.$B$1];[.$E457];[$JSON.$C$1];[.F457];[$JSON.$D$1];[.$G457];[$JSON.$E$1];IF(ISNA([.$T457]);&quot;null&quot;;&quot;&quot;&quot;&quot;&amp;[.$T457]&amp;&quot;&quot;&quot;&quot;);[$JSON.$F$1];[.$V457];[$JSON.$G$1];IF(ISNA([.$X457]);&quot;null&quot;;&quot;&quot;&quot;&quot;&amp;[.$X457]&amp;&quot;&quot;&quot;&quot;);[$JSON.$H$1];[.$AA457];[$JSON.$I$1];[.$I457];[$JSON.$J$1];[.K457];[$JSON.$K$1];[.$M457];[$JSON.$L$1];[.$P457];[$JSON.$M$1];[.$O457];[$JSON.$N$1];[.$S457];[$JSON.$O$1];[.$U457];[$JSON.$P$1];IF(ISNA([.$W457]);&quot;null&quot;;[.$W457]);[$JSON.$Q$1];[.$Y457];[$JSON.$R$1];IF([.$Z457];&quot;true&quot;;&quot;false&quot;);[$JSON.$S$1];[.$A457];[$JSON.$T$1];[.$B457];[$JSON.$U$1])" office:value-type="string" office:string-value="{&quot;id&quot;:&quot;2nd1-66&quot;,&quot;name&quot;:&quot;革命の広場&quot;,&quot;displayName&quot;:&quot;革命の広場 (第5弾)&quot;,&quot;kana&quot;:&quot;かくめいのひろば&quot;,&quot;traitText&quot;:null,&quot;ruleText&quot;:&quot;この能力は戦場で発動する。自分のメインフェイズが開始したとき、自分の戦場のイジン1体を指定して発動できる。そのイジンを破壊して、2ドローする。&quot;,&quot;legacyText&quot;:&quot;手札に戻す&quot;,&quot;imageUrl&quot;:&quot;https://one-draw.jp/ijinden/cardlist/005/card/05_066.png&quot;,&quot;expansion&quot;:55,&quot;rarity&quot;:1,&quot;type&quot;:2,&quot;level&quot;:3,&quot;color&quot;:2,&quot;term&quot;:0,&quot;trait&quot;:0,&quot;power&quot;:null,&quot;legacy&quot;:5,&quot;anyNumCopies&quot;:false,&quot;orderTable&quot;:456,&quot;orderDeck&quot;:321}," calcext:value-type="string">
            <text:p>{"id":"2nd1-66","name":"革命の広場","displayName":"革命の広場 (第5弾)","kana":"かくめいのひろば","traitText":null,"ruleText":"この能力は戦場で発動する。自分のメインフェイズが開始したとき、自分の戦場のイジン1体を指定して発動できる。そのイジンを破壊して、2ドローする。","legacyText":"手札に戻す","imageUrl":"https://one-draw.jp/ijinden/cardlist/005/card/05_066.png","expansion":55,"rarity":1,"type":2,"level":3,"color":2,"term":0,"trait":0,"power":null,"legacy":5,"anyNumCopies":false,"orderTable":456,"orderDeck":321},</text:p>
          </table:table-cell>
          <table:table-cell table:number-columns-repeated="16356"/>
        </table:table-row>
        <table:table-row table:style-name="ro2">
          <table:table-cell table:style-name="ce11" office:value-type="float" office:value="457" calcext:value-type="float">
            <text:p>457</text:p>
          </table:table-cell>
          <table:table-cell table:style-name="ce11" office:value-type="float" office:value="311" calcext:value-type="float">
            <text:p>311</text:p>
          </table:table-cell>
          <table:table-cell table:formula="of:=CONCATENATE(&quot;2nd1-&quot;;TEXT([.D458];&quot;0&quot;))" office:value-type="string" office:string-value="2nd1-67" calcext:value-type="string">
            <text:p>2nd1-67</text:p>
          </table:table-cell>
          <table:table-cell office:value-type="float" office:value="67" calcext:value-type="float">
            <text:p>67</text:p>
          </table:table-cell>
          <table:table-cell office:value-type="string" calcext:value-type="string">
            <text:p>禁制の御殿</text:p>
          </table:table-cell>
          <table:table-cell table:style-name="ce11" table:formula="of:=[.E458]" office:value-type="string" office:string-value="禁制の御殿" calcext:value-type="string">
            <text:p>禁制の御殿</text:p>
          </table:table-cell>
          <table:table-cell office:value-type="string" calcext:value-type="string">
            <text:p>きんせいのごてん</text:p>
          </table:table-cell>
          <table:table-cell table:style-name="ce11" office:value-type="string" calcext:value-type="string">
            <text:p>第５弾ブースターパック</text:p>
          </table:table-cell>
          <table:table-cell table:style-name="ce11" table:formula="of:=VLOOKUP([.H458];[$収録番号.$A$1:$収録番号.$B$10];2;0)" office:value-type="float" office:value="55" calcext:value-type="float">
            <text:p>55</text:p>
          </table:table-cell>
          <table:table-cell office:value-type="string" calcext:value-type="string">
            <text:p>N</text:p>
          </table:table-cell>
          <table:table-cell table:style-name="ce11" table:formula="of:=VLOOKUP([.J458];[$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58];[$種類番号.$A$1:$種類番号.$B$4];2;0)" office:value-type="float" office:value="2" calcext:value-type="float">
            <text:p>2</text:p>
          </table:table-cell>
          <table:table-cell office:value-type="string" calcext:value-type="string">
            <text:p>緑</text:p>
          </table:table-cell>
          <table:table-cell table:style-name="ce11" table:formula="of:=VLOOKUP([.N458];[$色番号.$A$1:$色番号.$B$10];2;0)" office:value-type="float" office:value="4" calcext:value-type="float">
            <text:p>4</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58];[$特性番号.$A$1:$特性番号.$B$8];2;0);0)" office:value-type="float" office:value="0" calcext:value-type="float">
            <text:p>0</text:p>
          </table:table-cell>
          <table:table-cell office:value-type="string" calcext:value-type="string">
            <text:p>この能力は戦場で効果を発揮する。自分と相手の戦場のイジンは、能力によって手札に戻らない。</text:p>
          </table:table-cell>
          <table:table-cell table:style-name="ce25" table:formula="of:=NA()" office:value-type="string" office:string-value="" calcext:value-type="error">
            <text:p>#N/A</text:p>
          </table:table-cell>
          <table:table-cell office:value-type="string" calcext:value-type="string">
            <text:p>魔力化</text:p>
          </table:table-cell>
          <table:table-cell table:style-name="ce11" table:formula="of:=IFERROR(VLOOKUP([.$X458];[$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67.png</text:p>
          </table:table-cell>
          <table:table-cell table:style-name="ce11" table:formula="of:=CONCATENATE([$JSON.$A$1];[.$C458];[$JSON.$B$1];[.$E458];[$JSON.$C$1];[.F458];[$JSON.$D$1];[.$G458];[$JSON.$E$1];IF(ISNA([.$T458]);&quot;null&quot;;&quot;&quot;&quot;&quot;&amp;[.$T458]&amp;&quot;&quot;&quot;&quot;);[$JSON.$F$1];[.$V458];[$JSON.$G$1];IF(ISNA([.$X458]);&quot;null&quot;;&quot;&quot;&quot;&quot;&amp;[.$X458]&amp;&quot;&quot;&quot;&quot;);[$JSON.$H$1];[.$AA458];[$JSON.$I$1];[.$I458];[$JSON.$J$1];[.K458];[$JSON.$K$1];[.$M458];[$JSON.$L$1];[.$P458];[$JSON.$M$1];[.$O458];[$JSON.$N$1];[.$S458];[$JSON.$O$1];[.$U458];[$JSON.$P$1];IF(ISNA([.$W458]);&quot;null&quot;;[.$W458]);[$JSON.$Q$1];[.$Y458];[$JSON.$R$1];IF([.$Z458];&quot;true&quot;;&quot;false&quot;);[$JSON.$S$1];[.$A458];[$JSON.$T$1];[.$B458];[$JSON.$U$1])" office:value-type="string" office:string-value="{&quot;id&quot;:&quot;2nd1-67&quot;,&quot;name&quot;:&quot;禁制の御殿&quot;,&quot;displayName&quot;:&quot;禁制の御殿&quot;,&quot;kana&quot;:&quot;きんせいのごてん&quot;,&quot;traitText&quot;:null,&quot;ruleText&quot;:&quot;この能力は戦場で効果を発揮する。自分と相手の戦場のイジンは、能力によって手札に戻らない。&quot;,&quot;legacyText&quot;:&quot;魔力化&quot;,&quot;imageUrl&quot;:&quot;https://one-draw.jp/ijinden/cardlist/005/card/05_067.png&quot;,&quot;expansion&quot;:55,&quot;rarity&quot;:1,&quot;type&quot;:2,&quot;level&quot;:2,&quot;color&quot;:4,&quot;term&quot;:0,&quot;trait&quot;:0,&quot;power&quot;:null,&quot;legacy&quot;:1,&quot;anyNumCopies&quot;:false,&quot;orderTable&quot;:457,&quot;orderDeck&quot;:311}," calcext:value-type="string">
            <text:p>{"id":"2nd1-67","name":"禁制の御殿","displayName":"禁制の御殿","kana":"きんせいのごてん","traitText":null,"ruleText":"この能力は戦場で効果を発揮する。自分と相手の戦場のイジンは、能力によって手札に戻らない。","legacyText":"魔力化","imageUrl":"https://one-draw.jp/ijinden/cardlist/005/card/05_067.png","expansion":55,"rarity":1,"type":2,"level":2,"color":4,"term":0,"trait":0,"power":null,"legacy":1,"anyNumCopies":false,"orderTable":457,"orderDeck":311},</text:p>
          </table:table-cell>
          <table:table-cell table:number-columns-repeated="16356"/>
        </table:table-row>
        <table:table-row table:style-name="ro2">
          <table:table-cell table:style-name="ce11" office:value-type="float" office:value="458" calcext:value-type="float">
            <text:p>458</text:p>
          </table:table-cell>
          <table:table-cell table:style-name="ce11" office:value-type="float" office:value="302" calcext:value-type="float">
            <text:p>302</text:p>
          </table:table-cell>
          <table:table-cell table:formula="of:=CONCATENATE(&quot;2nd1-&quot;;TEXT([.D459];&quot;0&quot;))" office:value-type="string" office:string-value="2nd1-68" calcext:value-type="string">
            <text:p>2nd1-68</text:p>
          </table:table-cell>
          <table:table-cell office:value-type="float" office:value="68" calcext:value-type="float">
            <text:p>68</text:p>
          </table:table-cell>
          <table:table-cell office:value-type="string" calcext:value-type="string">
            <text:p>米百俵</text:p>
          </table:table-cell>
          <table:table-cell table:style-name="ce11" table:formula="of:=[.E459]" office:value-type="string" office:string-value="米百俵" calcext:value-type="string">
            <text:p>米百俵</text:p>
          </table:table-cell>
          <table:table-cell office:value-type="string" calcext:value-type="string">
            <text:p>こめひゃっぴょう</text:p>
          </table:table-cell>
          <table:table-cell table:style-name="ce11" office:value-type="string" calcext:value-type="string">
            <text:p>第５弾ブースターパック</text:p>
          </table:table-cell>
          <table:table-cell table:style-name="ce11" table:formula="of:=VLOOKUP([.H459];[$収録番号.$A$1:$収録番号.$B$10];2;0)" office:value-type="float" office:value="55" calcext:value-type="float">
            <text:p>55</text:p>
          </table:table-cell>
          <table:table-cell office:value-type="string" calcext:value-type="string">
            <text:p>N</text:p>
          </table:table-cell>
          <table:table-cell table:style-name="ce11" table:formula="of:=VLOOKUP([.J459];[$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59];[$種類番号.$A$1:$種類番号.$B$4];2;0)" office:value-type="float" office:value="2" calcext:value-type="float">
            <text:p>2</text:p>
          </table:table-cell>
          <table:table-cell office:value-type="string" calcext:value-type="string">
            <text:p>緑</text:p>
          </table:table-cell>
          <table:table-cell table:style-name="ce11" table:formula="of:=VLOOKUP([.N459];[$色番号.$A$1:$色番号.$B$10];2;0)" office:value-type="float" office:value="4" calcext:value-type="float">
            <text:p>4</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5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59];[$特性番号.$A$1:$特性番号.$B$8];2;0);0)" office:value-type="float" office:value="0" calcext:value-type="float">
            <text:p>0</text:p>
          </table:table-cell>
          <table:table-cell office:value-type="string" calcext:value-type="string">
            <text:p>この能力は戦場で効果を発揮する。自分が能力によってカードを引く際、カードを引く代わりに同じ数だけマリョク配置権を増やしてもよい。</text:p>
          </table:table-cell>
          <table:table-cell table:style-name="ce25" table:formula="of:=NA()" office:value-type="string" office:string-value="" calcext:value-type="error">
            <text:p>#N/A</text:p>
          </table:table-cell>
          <table:table-cell office:value-type="string" calcext:value-type="string">
            <text:p>魔力化</text:p>
          </table:table-cell>
          <table:table-cell table:style-name="ce11" table:formula="of:=IFERROR(VLOOKUP([.$X459];[$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68.png</text:p>
          </table:table-cell>
          <table:table-cell table:style-name="ce11" table:formula="of:=CONCATENATE([$JSON.$A$1];[.$C459];[$JSON.$B$1];[.$E459];[$JSON.$C$1];[.F459];[$JSON.$D$1];[.$G459];[$JSON.$E$1];IF(ISNA([.$T459]);&quot;null&quot;;&quot;&quot;&quot;&quot;&amp;[.$T459]&amp;&quot;&quot;&quot;&quot;);[$JSON.$F$1];[.$V459];[$JSON.$G$1];IF(ISNA([.$X459]);&quot;null&quot;;&quot;&quot;&quot;&quot;&amp;[.$X459]&amp;&quot;&quot;&quot;&quot;);[$JSON.$H$1];[.$AA459];[$JSON.$I$1];[.$I459];[$JSON.$J$1];[.K459];[$JSON.$K$1];[.$M459];[$JSON.$L$1];[.$P459];[$JSON.$M$1];[.$O459];[$JSON.$N$1];[.$S459];[$JSON.$O$1];[.$U459];[$JSON.$P$1];IF(ISNA([.$W459]);&quot;null&quot;;[.$W459]);[$JSON.$Q$1];[.$Y459];[$JSON.$R$1];IF([.$Z459];&quot;true&quot;;&quot;false&quot;);[$JSON.$S$1];[.$A459];[$JSON.$T$1];[.$B459];[$JSON.$U$1])" office:value-type="string" office:string-value="{&quot;id&quot;:&quot;2nd1-68&quot;,&quot;name&quot;:&quot;米百俵&quot;,&quot;displayName&quot;:&quot;米百俵&quot;,&quot;kana&quot;:&quot;こめひゃっぴょう&quot;,&quot;traitText&quot;:null,&quot;ruleText&quot;:&quot;この能力は戦場で効果を発揮する。自分が能力によってカードを引く際、カードを引く代わりに同じ数だけマリョク配置権を増やしてもよい。&quot;,&quot;legacyText&quot;:&quot;魔力化&quot;,&quot;imageUrl&quot;:&quot;https://one-draw.jp/ijinden/cardlist/005/card/05_068.png&quot;,&quot;expansion&quot;:55,&quot;rarity&quot;:1,&quot;type&quot;:2,&quot;level&quot;:1,&quot;color&quot;:4,&quot;term&quot;:0,&quot;trait&quot;:0,&quot;power&quot;:null,&quot;legacy&quot;:1,&quot;anyNumCopies&quot;:false,&quot;orderTable&quot;:458,&quot;orderDeck&quot;:302}," calcext:value-type="string">
            <text:p>{"id":"2nd1-68","name":"米百俵","displayName":"米百俵","kana":"こめひゃっぴょう","traitText":null,"ruleText":"この能力は戦場で効果を発揮する。自分が能力によってカードを引く際、カードを引く代わりに同じ数だけマリョク配置権を増やしてもよい。","legacyText":"魔力化","imageUrl":"https://one-draw.jp/ijinden/cardlist/005/card/05_068.png","expansion":55,"rarity":1,"type":2,"level":1,"color":4,"term":0,"trait":0,"power":null,"legacy":1,"anyNumCopies":false,"orderTable":458,"orderDeck":302},</text:p>
          </table:table-cell>
          <table:table-cell table:number-columns-repeated="16356"/>
        </table:table-row>
        <table:table-row table:style-name="ro2">
          <table:table-cell table:style-name="ce11" office:value-type="float" office:value="459" calcext:value-type="float">
            <text:p>459</text:p>
          </table:table-cell>
          <table:table-cell table:style-name="ce11" office:value-type="float" office:value="352" calcext:value-type="float">
            <text:p>352</text:p>
          </table:table-cell>
          <table:table-cell table:formula="of:=CONCATENATE(&quot;2nd1-&quot;;TEXT([.D460];&quot;0&quot;))" office:value-type="string" office:string-value="2nd1-69" calcext:value-type="string">
            <text:p>2nd1-69</text:p>
          </table:table-cell>
          <table:table-cell office:value-type="float" office:value="69" calcext:value-type="float">
            <text:p>69</text:p>
          </table:table-cell>
          <table:table-cell office:value-type="string" calcext:value-type="string">
            <text:p>毘盧遮那仏像</text:p>
          </table:table-cell>
          <table:table-cell office:value-type="string" calcext:value-type="string">
            <text:p>毘盧遮那仏像 (第5弾)</text:p>
          </table:table-cell>
          <table:table-cell office:value-type="string" calcext:value-type="string">
            <text:p>びるしゃなぶつぞう</text:p>
          </table:table-cell>
          <table:table-cell table:style-name="ce11" office:value-type="string" calcext:value-type="string">
            <text:p>第５弾ブースターパック</text:p>
          </table:table-cell>
          <table:table-cell table:style-name="ce11" table:formula="of:=VLOOKUP([.H460];[$収録番号.$A$1:$収録番号.$B$10];2;0)" office:value-type="float" office:value="55" calcext:value-type="float">
            <text:p>55</text:p>
          </table:table-cell>
          <table:table-cell office:value-type="string" calcext:value-type="string">
            <text:p>N</text:p>
          </table:table-cell>
          <table:table-cell table:style-name="ce11" table:formula="of:=VLOOKUP([.J460];[$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60];[$種類番号.$A$1:$種類番号.$B$4];2;0)" office:value-type="float" office:value="2" calcext:value-type="float">
            <text:p>2</text:p>
          </table:table-cell>
          <table:table-cell office:value-type="string" calcext:value-type="string">
            <text:p>緑</text:p>
          </table:table-cell>
          <table:table-cell table:style-name="ce11" table:formula="of:=VLOOKUP([.N460];[$色番号.$A$1:$色番号.$B$10];2;0)" office:value-type="float" office:value="4" calcext:value-type="float">
            <text:p>4</text:p>
          </table:table-cell>
          <table:table-cell office:value-type="float" office:value="6" calcext:value-type="float">
            <text:p>6</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6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60];[$特性番号.$A$1:$特性番号.$B$8];2;0);0)" office:value-type="float" office:value="0" calcext:value-type="float">
            <text:p>0</text:p>
          </table:table-cell>
          <table:table-cell office:value-type="string" calcext:value-type="string">
            <text:p>この能力は、自分の戦場のイジンが寝たときに戦場で発動できる。自分の戦場の寝ているイジン1体を起こす。¶この能力は戦場で効果を発揮する。自分の戦場のイジンは「パワー+1000」を得る。</text:p>
          </table:table-cell>
          <table:table-cell table:style-name="ce25" table:formula="of:=NA()" office:value-type="string" office:string-value="" calcext:value-type="error">
            <text:p>#N/A</text:p>
          </table:table-cell>
          <table:table-cell office:value-type="string" calcext:value-type="string">
            <text:p>魔力化</text:p>
          </table:table-cell>
          <table:table-cell table:style-name="ce11" table:formula="of:=IFERROR(VLOOKUP([.$X460];[$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69.png</text:p>
          </table:table-cell>
          <table:table-cell table:style-name="ce11" table:formula="of:=CONCATENATE([$JSON.$A$1];[.$C460];[$JSON.$B$1];[.$E460];[$JSON.$C$1];[.F460];[$JSON.$D$1];[.$G460];[$JSON.$E$1];IF(ISNA([.$T460]);&quot;null&quot;;&quot;&quot;&quot;&quot;&amp;[.$T460]&amp;&quot;&quot;&quot;&quot;);[$JSON.$F$1];[.$V460];[$JSON.$G$1];IF(ISNA([.$X460]);&quot;null&quot;;&quot;&quot;&quot;&quot;&amp;[.$X460]&amp;&quot;&quot;&quot;&quot;);[$JSON.$H$1];[.$AA460];[$JSON.$I$1];[.$I460];[$JSON.$J$1];[.K460];[$JSON.$K$1];[.$M460];[$JSON.$L$1];[.$P460];[$JSON.$M$1];[.$O460];[$JSON.$N$1];[.$S460];[$JSON.$O$1];[.$U460];[$JSON.$P$1];IF(ISNA([.$W460]);&quot;null&quot;;[.$W460]);[$JSON.$Q$1];[.$Y460];[$JSON.$R$1];IF([.$Z460];&quot;true&quot;;&quot;false&quot;);[$JSON.$S$1];[.$A460];[$JSON.$T$1];[.$B460];[$JSON.$U$1])" office:value-type="string" office:string-value="{&quot;id&quot;:&quot;2nd1-69&quot;,&quot;name&quot;:&quot;毘盧遮那仏像&quot;,&quot;displayName&quot;:&quot;毘盧遮那仏像 (第5弾)&quot;,&quot;kana&quot;:&quot;びるしゃなぶつぞう&quot;,&quot;traitText&quot;:null,&quot;ruleText&quot;:&quot;この能力は、自分の戦場のイジンが寝たときに戦場で発動できる。自分の戦場の寝ているイジン1体を起こす。¶この能力は戦場で効果を発揮する。自分の戦場のイジンは「パワー+1000」を得る。&quot;,&quot;legacyText&quot;:&quot;魔力化&quot;,&quot;imageUrl&quot;:&quot;https://one-draw.jp/ijinden/cardlist/005/card/05_069.png&quot;,&quot;expansion&quot;:55,&quot;rarity&quot;:1,&quot;type&quot;:2,&quot;level&quot;:6,&quot;color&quot;:4,&quot;term&quot;:0,&quot;trait&quot;:0,&quot;power&quot;:null,&quot;legacy&quot;:1,&quot;anyNumCopies&quot;:false,&quot;orderTable&quot;:459,&quot;orderDeck&quot;:352}," calcext:value-type="string">
            <text:p>{"id":"2nd1-69","name":"毘盧遮那仏像","displayName":"毘盧遮那仏像 (第5弾)","kana":"びるしゃなぶつぞう","traitText":null,"ruleText":"この能力は、自分の戦場のイジンが寝たときに戦場で発動できる。自分の戦場の寝ているイジン1体を起こす。¶この能力は戦場で効果を発揮する。自分の戦場のイジンは「パワー+1000」を得る。","legacyText":"魔力化","imageUrl":"https://one-draw.jp/ijinden/cardlist/005/card/05_069.png","expansion":55,"rarity":1,"type":2,"level":6,"color":4,"term":0,"trait":0,"power":null,"legacy":1,"anyNumCopies":false,"orderTable":459,"orderDeck":352},</text:p>
          </table:table-cell>
          <table:table-cell table:number-columns-repeated="16356"/>
        </table:table-row>
        <table:table-row table:style-name="ro2">
          <table:table-cell table:style-name="ce11" office:value-type="float" office:value="460" calcext:value-type="float">
            <text:p>460</text:p>
          </table:table-cell>
          <table:table-cell table:style-name="ce11" office:value-type="float" office:value="339" calcext:value-type="float">
            <text:p>339</text:p>
          </table:table-cell>
          <table:table-cell table:formula="of:=CONCATENATE(&quot;2nd1-&quot;;TEXT([.D461];&quot;0&quot;))" office:value-type="string" office:string-value="2nd1-70" calcext:value-type="string">
            <text:p>2nd1-70</text:p>
          </table:table-cell>
          <table:table-cell office:value-type="float" office:value="70" calcext:value-type="float">
            <text:p>70</text:p>
          </table:table-cell>
          <table:table-cell office:value-type="string" calcext:value-type="string">
            <text:p>精霊の島々</text:p>
          </table:table-cell>
          <table:table-cell table:style-name="ce11" table:formula="of:=[.E461]" office:value-type="string" office:string-value="精霊の島々" calcext:value-type="string">
            <text:p>精霊の島々</text:p>
          </table:table-cell>
          <table:table-cell office:value-type="string" calcext:value-type="string">
            <text:p>せいれいのしまじま</text:p>
          </table:table-cell>
          <table:table-cell table:style-name="ce11" office:value-type="string" calcext:value-type="string">
            <text:p>第５弾ブースターパック</text:p>
          </table:table-cell>
          <table:table-cell table:style-name="ce11" table:formula="of:=VLOOKUP([.H461];[$収録番号.$A$1:$収録番号.$B$10];2;0)" office:value-type="float" office:value="55" calcext:value-type="float">
            <text:p>55</text:p>
          </table:table-cell>
          <table:table-cell office:value-type="string" calcext:value-type="string">
            <text:p>N</text:p>
          </table:table-cell>
          <table:table-cell table:style-name="ce11" table:formula="of:=VLOOKUP([.J461];[$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61];[$種類番号.$A$1:$種類番号.$B$4];2;0)" office:value-type="float" office:value="2" calcext:value-type="float">
            <text:p>2</text:p>
          </table:table-cell>
          <table:table-cell office:value-type="string" calcext:value-type="string">
            <text:p>黄</text:p>
          </table:table-cell>
          <table:table-cell table:style-name="ce11" table:formula="of:=VLOOKUP([.N461];[$色番号.$A$1:$色番号.$B$10];2;0)" office:value-type="float" office:value="8" calcext:value-type="float">
            <text:p>8</text:p>
          </table:table-cell>
          <table:table-cell office:value-type="float" office:value="4" calcext:value-type="float">
            <text:p>4</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6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61];[$特性番号.$A$1:$特性番号.$B$8];2;0);0)" office:value-type="float" office:value="0" calcext:value-type="float">
            <text:p>0</text:p>
          </table:table-cell>
          <table:table-cell office:value-type="string" calcext:value-type="string">
            <text:p>この能力は、自分の山札のカードが0枚になったときに戦場か墓地で発動できる。自分の手札のカードすべてを山札に戻してシャッフルし、相手の手札のカードすべてを墓地に置く。</text:p>
          </table:table-cell>
          <table:table-cell table:style-name="ce25"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461];[$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70.png</text:p>
          </table:table-cell>
          <table:table-cell table:style-name="ce11" table:formula="of:=CONCATENATE([$JSON.$A$1];[.$C461];[$JSON.$B$1];[.$E461];[$JSON.$C$1];[.F461];[$JSON.$D$1];[.$G461];[$JSON.$E$1];IF(ISNA([.$T461]);&quot;null&quot;;&quot;&quot;&quot;&quot;&amp;[.$T461]&amp;&quot;&quot;&quot;&quot;);[$JSON.$F$1];[.$V461];[$JSON.$G$1];IF(ISNA([.$X461]);&quot;null&quot;;&quot;&quot;&quot;&quot;&amp;[.$X461]&amp;&quot;&quot;&quot;&quot;);[$JSON.$H$1];[.$AA461];[$JSON.$I$1];[.$I461];[$JSON.$J$1];[.K461];[$JSON.$K$1];[.$M461];[$JSON.$L$1];[.$P461];[$JSON.$M$1];[.$O461];[$JSON.$N$1];[.$S461];[$JSON.$O$1];[.$U461];[$JSON.$P$1];IF(ISNA([.$W461]);&quot;null&quot;;[.$W461]);[$JSON.$Q$1];[.$Y461];[$JSON.$R$1];IF([.$Z461];&quot;true&quot;;&quot;false&quot;);[$JSON.$S$1];[.$A461];[$JSON.$T$1];[.$B461];[$JSON.$U$1])" office:value-type="string" office:string-value="{&quot;id&quot;:&quot;2nd1-70&quot;,&quot;name&quot;:&quot;精霊の島々&quot;,&quot;displayName&quot;:&quot;精霊の島々&quot;,&quot;kana&quot;:&quot;せいれいのしまじま&quot;,&quot;traitText&quot;:null,&quot;ruleText&quot;:&quot;この能力は、自分の山札のカードが0枚になったときに戦場か墓地で発動できる。自分の手札のカードすべてを山札に戻してシャッフルし、相手の手札のカードすべてを墓地に置く。&quot;,&quot;legacyText&quot;:null,&quot;imageUrl&quot;:&quot;https://one-draw.jp/ijinden/cardlist/005/card/05_070.png&quot;,&quot;expansion&quot;:55,&quot;rarity&quot;:1,&quot;type&quot;:2,&quot;level&quot;:4,&quot;color&quot;:8,&quot;term&quot;:0,&quot;trait&quot;:0,&quot;power&quot;:null,&quot;legacy&quot;:0,&quot;anyNumCopies&quot;:false,&quot;orderTable&quot;:460,&quot;orderDeck&quot;:339}," calcext:value-type="string">
            <text:p>{"id":"2nd1-70","name":"精霊の島々","displayName":"精霊の島々","kana":"せいれいのしまじま","traitText":null,"ruleText":"この能力は、自分の山札のカードが0枚になったときに戦場か墓地で発動できる。自分の手札のカードすべてを山札に戻してシャッフルし、相手の手札のカードすべてを墓地に置く。","legacyText":null,"imageUrl":"https://one-draw.jp/ijinden/cardlist/005/card/05_070.png","expansion":55,"rarity":1,"type":2,"level":4,"color":8,"term":0,"trait":0,"power":null,"legacy":0,"anyNumCopies":false,"orderTable":460,"orderDeck":339},</text:p>
          </table:table-cell>
          <table:table-cell table:number-columns-repeated="16356"/>
        </table:table-row>
        <table:table-row table:style-name="ro2">
          <table:table-cell table:style-name="ce11" office:value-type="float" office:value="461" calcext:value-type="float">
            <text:p>461</text:p>
          </table:table-cell>
          <table:table-cell table:style-name="ce11" office:value-type="float" office:value="329" calcext:value-type="float">
            <text:p>329</text:p>
          </table:table-cell>
          <table:table-cell table:formula="of:=CONCATENATE(&quot;2nd1-&quot;;TEXT([.D462];&quot;0&quot;))" office:value-type="string" office:string-value="2nd1-71" calcext:value-type="string">
            <text:p>2nd1-71</text:p>
          </table:table-cell>
          <table:table-cell office:value-type="float" office:value="71" calcext:value-type="float">
            <text:p>71</text:p>
          </table:table-cell>
          <table:table-cell office:value-type="string" calcext:value-type="string">
            <text:p>四面楚歌</text:p>
          </table:table-cell>
          <table:table-cell table:style-name="ce11" table:formula="of:=[.E462]" office:value-type="string" office:string-value="四面楚歌" calcext:value-type="string">
            <text:p>四面楚歌</text:p>
          </table:table-cell>
          <table:table-cell office:value-type="string" calcext:value-type="string">
            <text:p>しめんそか</text:p>
          </table:table-cell>
          <table:table-cell table:style-name="ce11" office:value-type="string" calcext:value-type="string">
            <text:p>第５弾ブースターパック</text:p>
          </table:table-cell>
          <table:table-cell table:style-name="ce11" table:formula="of:=VLOOKUP([.H462];[$収録番号.$A$1:$収録番号.$B$10];2;0)" office:value-type="float" office:value="55" calcext:value-type="float">
            <text:p>55</text:p>
          </table:table-cell>
          <table:table-cell office:value-type="string" calcext:value-type="string">
            <text:p>N</text:p>
          </table:table-cell>
          <table:table-cell table:style-name="ce11" table:formula="of:=VLOOKUP([.J462];[$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62];[$種類番号.$A$1:$種類番号.$B$4];2;0)" office:value-type="float" office:value="2" calcext:value-type="float">
            <text:p>2</text:p>
          </table:table-cell>
          <table:table-cell office:value-type="string" calcext:value-type="string">
            <text:p>黄</text:p>
          </table:table-cell>
          <table:table-cell table:style-name="ce11" table:formula="of:=VLOOKUP([.N462];[$色番号.$A$1:$色番号.$B$10];2;0)" office:value-type="float" office:value="8" calcext:value-type="float">
            <text:p>8</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6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62];[$特性番号.$A$1:$特性番号.$B$8];2;0);0)" office:value-type="float" office:value="0" calcext:value-type="float">
            <text:p>0</text:p>
          </table:table-cell>
          <table:table-cell office:value-type="string" calcext:value-type="string">
            <text:p>この能力は、相手のエンドフェイズが開始したときに戦場で発動できる。自分の山札の上からカード1つを墓地に置く。¶この能力は、相手のターンに戦場か墓地で効果を発揮する。自分の墓地の遺業能力は山札から墓地に置かれても発動する。</text:p>
          </table:table-cell>
          <table:table-cell table:style-name="ce25"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462];[$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71.png</text:p>
          </table:table-cell>
          <table:table-cell table:style-name="ce11" table:formula="of:=CONCATENATE([$JSON.$A$1];[.$C462];[$JSON.$B$1];[.$E462];[$JSON.$C$1];[.F462];[$JSON.$D$1];[.$G462];[$JSON.$E$1];IF(ISNA([.$T462]);&quot;null&quot;;&quot;&quot;&quot;&quot;&amp;[.$T462]&amp;&quot;&quot;&quot;&quot;);[$JSON.$F$1];[.$V462];[$JSON.$G$1];IF(ISNA([.$X462]);&quot;null&quot;;&quot;&quot;&quot;&quot;&amp;[.$X462]&amp;&quot;&quot;&quot;&quot;);[$JSON.$H$1];[.$AA462];[$JSON.$I$1];[.$I462];[$JSON.$J$1];[.K462];[$JSON.$K$1];[.$M462];[$JSON.$L$1];[.$P462];[$JSON.$M$1];[.$O462];[$JSON.$N$1];[.$S462];[$JSON.$O$1];[.$U462];[$JSON.$P$1];IF(ISNA([.$W462]);&quot;null&quot;;[.$W462]);[$JSON.$Q$1];[.$Y462];[$JSON.$R$1];IF([.$Z462];&quot;true&quot;;&quot;false&quot;);[$JSON.$S$1];[.$A462];[$JSON.$T$1];[.$B462];[$JSON.$U$1])" office:value-type="string" office:string-value="{&quot;id&quot;:&quot;2nd1-71&quot;,&quot;name&quot;:&quot;四面楚歌&quot;,&quot;displayName&quot;:&quot;四面楚歌&quot;,&quot;kana&quot;:&quot;しめんそか&quot;,&quot;traitText&quot;:null,&quot;ruleText&quot;:&quot;この能力は、相手のエンドフェイズが開始したときに戦場で発動できる。自分の山札の上からカード1つを墓地に置く。¶この能力は、相手のターンに戦場か墓地で効果を発揮する。自分の墓地の遺業能力は山札から墓地に置かれても発動する。&quot;,&quot;legacyText&quot;:null,&quot;imageUrl&quot;:&quot;https://one-draw.jp/ijinden/cardlist/005/card/05_071.png&quot;,&quot;expansion&quot;:55,&quot;rarity&quot;:1,&quot;type&quot;:2,&quot;level&quot;:3,&quot;color&quot;:8,&quot;term&quot;:0,&quot;trait&quot;:0,&quot;power&quot;:null,&quot;legacy&quot;:0,&quot;anyNumCopies&quot;:false,&quot;orderTable&quot;:461,&quot;orderDeck&quot;:329}," calcext:value-type="string">
            <text:p>{"id":"2nd1-71","name":"四面楚歌","displayName":"四面楚歌","kana":"しめんそか","traitText":null,"ruleText":"この能力は、相手のエンドフェイズが開始したときに戦場で発動できる。自分の山札の上からカード1つを墓地に置く。¶この能力は、相手のターンに戦場か墓地で効果を発揮する。自分の墓地の遺業能力は山札から墓地に置かれても発動する。","legacyText":null,"imageUrl":"https://one-draw.jp/ijinden/cardlist/005/card/05_071.png","expansion":55,"rarity":1,"type":2,"level":3,"color":8,"term":0,"trait":0,"power":null,"legacy":0,"anyNumCopies":false,"orderTable":461,"orderDeck":329},</text:p>
          </table:table-cell>
          <table:table-cell table:number-columns-repeated="16356"/>
        </table:table-row>
        <table:table-row table:style-name="ro2">
          <table:table-cell table:style-name="ce11" office:value-type="float" office:value="462" calcext:value-type="float">
            <text:p>462</text:p>
          </table:table-cell>
          <table:table-cell table:style-name="ce11" office:value-type="float" office:value="314" calcext:value-type="float">
            <text:p>314</text:p>
          </table:table-cell>
          <table:table-cell table:formula="of:=CONCATENATE(&quot;2nd1-&quot;;TEXT([.D463];&quot;0&quot;))" office:value-type="string" office:string-value="2nd1-72" calcext:value-type="string">
            <text:p>2nd1-72</text:p>
          </table:table-cell>
          <table:table-cell office:value-type="float" office:value="72" calcext:value-type="float">
            <text:p>72</text:p>
          </table:table-cell>
          <table:table-cell office:value-type="string" calcext:value-type="string">
            <text:p>地上の紫微垣</text:p>
          </table:table-cell>
          <table:table-cell office:value-type="string" calcext:value-type="string">
            <text:p>地上の紫微垣 (第5弾)</text:p>
          </table:table-cell>
          <table:table-cell office:value-type="string" calcext:value-type="string">
            <text:p>ちじょうのしびえん</text:p>
          </table:table-cell>
          <table:table-cell table:style-name="ce11" office:value-type="string" calcext:value-type="string">
            <text:p>第５弾ブースターパック</text:p>
          </table:table-cell>
          <table:table-cell table:style-name="ce11" table:formula="of:=VLOOKUP([.H463];[$収録番号.$A$1:$収録番号.$B$10];2;0)" office:value-type="float" office:value="55" calcext:value-type="float">
            <text:p>55</text:p>
          </table:table-cell>
          <table:table-cell office:value-type="string" calcext:value-type="string">
            <text:p>N</text:p>
          </table:table-cell>
          <table:table-cell table:style-name="ce11" table:formula="of:=VLOOKUP([.J463];[$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63];[$種類番号.$A$1:$種類番号.$B$4];2;0)" office:value-type="float" office:value="2" calcext:value-type="float">
            <text:p>2</text:p>
          </table:table-cell>
          <table:table-cell office:value-type="string" calcext:value-type="string">
            <text:p>黄</text:p>
          </table:table-cell>
          <table:table-cell table:style-name="ce11" table:formula="of:=VLOOKUP([.N463];[$色番号.$A$1:$色番号.$B$10];2;0)" office:value-type="float" office:value="8" calcext:value-type="float">
            <text:p>8</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6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63];[$特性番号.$A$1:$特性番号.$B$8];2;0);0)" office:value-type="float" office:value="0" calcext:value-type="float">
            <text:p>0</text:p>
          </table:table-cell>
          <table:table-cell office:value-type="string" calcext:value-type="string">
            <text:p>この能力は戦場か墓地で効果を発揮する。自分のマリョク配置において、表で置く限り、ターンに1回だけ自分の墓地のマリョクも選べる。</text:p>
          </table:table-cell>
          <table:table-cell table:style-name="ce25"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463];[$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72.png</text:p>
          </table:table-cell>
          <table:table-cell table:style-name="ce11" table:formula="of:=CONCATENATE([$JSON.$A$1];[.$C463];[$JSON.$B$1];[.$E463];[$JSON.$C$1];[.F463];[$JSON.$D$1];[.$G463];[$JSON.$E$1];IF(ISNA([.$T463]);&quot;null&quot;;&quot;&quot;&quot;&quot;&amp;[.$T463]&amp;&quot;&quot;&quot;&quot;);[$JSON.$F$1];[.$V463];[$JSON.$G$1];IF(ISNA([.$X463]);&quot;null&quot;;&quot;&quot;&quot;&quot;&amp;[.$X463]&amp;&quot;&quot;&quot;&quot;);[$JSON.$H$1];[.$AA463];[$JSON.$I$1];[.$I463];[$JSON.$J$1];[.K463];[$JSON.$K$1];[.$M463];[$JSON.$L$1];[.$P463];[$JSON.$M$1];[.$O463];[$JSON.$N$1];[.$S463];[$JSON.$O$1];[.$U463];[$JSON.$P$1];IF(ISNA([.$W463]);&quot;null&quot;;[.$W463]);[$JSON.$Q$1];[.$Y463];[$JSON.$R$1];IF([.$Z463];&quot;true&quot;;&quot;false&quot;);[$JSON.$S$1];[.$A463];[$JSON.$T$1];[.$B463];[$JSON.$U$1])" office:value-type="string" office:string-value="{&quot;id&quot;:&quot;2nd1-72&quot;,&quot;name&quot;:&quot;地上の紫微垣&quot;,&quot;displayName&quot;:&quot;地上の紫微垣 (第5弾)&quot;,&quot;kana&quot;:&quot;ちじょうのしびえん&quot;,&quot;traitText&quot;:null,&quot;ruleText&quot;:&quot;この能力は戦場か墓地で効果を発揮する。自分のマリョク配置において、表で置く限り、ターンに1回だけ自分の墓地のマリョクも選べる。&quot;,&quot;legacyText&quot;:null,&quot;imageUrl&quot;:&quot;https://one-draw.jp/ijinden/cardlist/005/card/05_072.png&quot;,&quot;expansion&quot;:55,&quot;rarity&quot;:1,&quot;type&quot;:2,&quot;level&quot;:2,&quot;color&quot;:8,&quot;term&quot;:0,&quot;trait&quot;:0,&quot;power&quot;:null,&quot;legacy&quot;:0,&quot;anyNumCopies&quot;:false,&quot;orderTable&quot;:462,&quot;orderDeck&quot;:314}," calcext:value-type="string">
            <text:p>{"id":"2nd1-72","name":"地上の紫微垣","displayName":"地上の紫微垣 (第5弾)","kana":"ちじょうのしびえん","traitText":null,"ruleText":"この能力は戦場か墓地で効果を発揮する。自分のマリョク配置において、表で置く限り、ターンに1回だけ自分の墓地のマリョクも選べる。","legacyText":null,"imageUrl":"https://one-draw.jp/ijinden/cardlist/005/card/05_072.png","expansion":55,"rarity":1,"type":2,"level":2,"color":8,"term":0,"trait":0,"power":null,"legacy":0,"anyNumCopies":false,"orderTable":462,"orderDeck":314},</text:p>
          </table:table-cell>
          <table:table-cell table:number-columns-repeated="16356"/>
        </table:table-row>
        <table:table-row table:style-name="ro2">
          <table:table-cell table:style-name="ce11" office:value-type="float" office:value="463" calcext:value-type="float">
            <text:p>463</text:p>
          </table:table-cell>
          <table:table-cell table:style-name="ce11" office:value-type="float" office:value="348" calcext:value-type="float">
            <text:p>348</text:p>
          </table:table-cell>
          <table:table-cell table:formula="of:=CONCATENATE(&quot;2nd1-&quot;;TEXT([.D464];&quot;0&quot;))" office:value-type="string" office:string-value="2nd1-73" calcext:value-type="string">
            <text:p>2nd1-73</text:p>
          </table:table-cell>
          <table:table-cell office:value-type="float" office:value="73" calcext:value-type="float">
            <text:p>73</text:p>
          </table:table-cell>
          <table:table-cell office:value-type="string" calcext:value-type="string">
            <text:p>擬洋風建築</text:p>
          </table:table-cell>
          <table:table-cell table:style-name="ce11" table:formula="of:=[.E464]" office:value-type="string" office:string-value="擬洋風建築" calcext:value-type="string">
            <text:p>擬洋風建築</text:p>
          </table:table-cell>
          <table:table-cell office:value-type="string" calcext:value-type="string">
            <text:p>ぎようふうけんちく</text:p>
          </table:table-cell>
          <table:table-cell table:style-name="ce11" office:value-type="string" calcext:value-type="string">
            <text:p>第５弾ブースターパック</text:p>
          </table:table-cell>
          <table:table-cell table:style-name="ce11" table:formula="of:=VLOOKUP([.H464];[$収録番号.$A$1:$収録番号.$B$10];2;0)" office:value-type="float" office:value="55" calcext:value-type="float">
            <text:p>55</text:p>
          </table:table-cell>
          <table:table-cell office:value-type="string" calcext:value-type="string">
            <text:p>N</text:p>
          </table:table-cell>
          <table:table-cell table:style-name="ce11" table:formula="of:=VLOOKUP([.J464];[$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64];[$種類番号.$A$1:$種類番号.$B$4];2;0)" office:value-type="float" office:value="2" calcext:value-type="float">
            <text:p>2</text:p>
          </table:table-cell>
          <table:table-cell office:value-type="string" calcext:value-type="string">
            <text:p>紫</text:p>
          </table:table-cell>
          <table:table-cell table:style-name="ce11" table:formula="of:=VLOOKUP([.N464];[$色番号.$A$1:$色番号.$B$10];2;0)" office:value-type="float" office:value="16" calcext:value-type="float">
            <text:p>16</text:p>
          </table:table-cell>
          <table:table-cell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6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64];[$特性番号.$A$1:$特性番号.$B$8];2;0);0)" office:value-type="float" office:value="0" calcext:value-type="float">
            <text:p>0</text:p>
          </table:table-cell>
          <table:table-cell office:value-type="string" calcext:value-type="string">
            <text:p>この能力は、自分のメインフェイズが開始したときに戦場で発動できる。次のどちらかの効果を選んで発揮する。¶・イジン召喚権+1する。¶・マリョク配置権+1する。¶この能力は、自分のイジン召喚権もマリョク配置権も0なら、自分のエンドフェイズが開始したときに戦場で発動する。これを破壊する。</text:p>
          </table:table-cell>
          <table:table-cell table:style-name="ce25"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464];[$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73.png</text:p>
          </table:table-cell>
          <table:table-cell table:style-name="ce11" table:formula="of:=CONCATENATE([$JSON.$A$1];[.$C464];[$JSON.$B$1];[.$E464];[$JSON.$C$1];[.F464];[$JSON.$D$1];[.$G464];[$JSON.$E$1];IF(ISNA([.$T464]);&quot;null&quot;;&quot;&quot;&quot;&quot;&amp;[.$T464]&amp;&quot;&quot;&quot;&quot;);[$JSON.$F$1];[.$V464];[$JSON.$G$1];IF(ISNA([.$X464]);&quot;null&quot;;&quot;&quot;&quot;&quot;&amp;[.$X464]&amp;&quot;&quot;&quot;&quot;);[$JSON.$H$1];[.$AA464];[$JSON.$I$1];[.$I464];[$JSON.$J$1];[.K464];[$JSON.$K$1];[.$M464];[$JSON.$L$1];[.$P464];[$JSON.$M$1];[.$O464];[$JSON.$N$1];[.$S464];[$JSON.$O$1];[.$U464];[$JSON.$P$1];IF(ISNA([.$W464]);&quot;null&quot;;[.$W464]);[$JSON.$Q$1];[.$Y464];[$JSON.$R$1];IF([.$Z464];&quot;true&quot;;&quot;false&quot;);[$JSON.$S$1];[.$A464];[$JSON.$T$1];[.$B464];[$JSON.$U$1])" office:value-type="string" office:string-value="{&quot;id&quot;:&quot;2nd1-73&quot;,&quot;name&quot;:&quot;擬洋風建築&quot;,&quot;displayName&quot;:&quot;擬洋風建築&quot;,&quot;kana&quot;:&quot;ぎようふうけんちく&quot;,&quot;traitText&quot;:null,&quot;ruleText&quot;:&quot;この能力は、自分のメインフェイズが開始したときに戦場で発動できる。次のどちらかの効果を選んで発揮する。¶・イジン召喚権+1する。¶・マリョク配置権+1する。¶この能力は、自分のイジン召喚権もマリョク配置権も0なら、自分のエンドフェイズが開始したときに戦場で発動する。これを破壊する。&quot;,&quot;legacyText&quot;:null,&quot;imageUrl&quot;:&quot;https://one-draw.jp/ijinden/cardlist/005/card/05_073.png&quot;,&quot;expansion&quot;:55,&quot;rarity&quot;:1,&quot;type&quot;:2,&quot;level&quot;:5,&quot;color&quot;:16,&quot;term&quot;:0,&quot;trait&quot;:0,&quot;power&quot;:null,&quot;legacy&quot;:0,&quot;anyNumCopies&quot;:false,&quot;orderTable&quot;:463,&quot;orderDeck&quot;:348}," calcext:value-type="string">
            <text:p>{"id":"2nd1-73","name":"擬洋風建築","displayName":"擬洋風建築","kana":"ぎようふうけんちく","traitText":null,"ruleText":"この能力は、自分のメインフェイズが開始したときに戦場で発動できる。次のどちらかの効果を選んで発揮する。¶・イジン召喚権+1する。¶・マリョク配置権+1する。¶この能力は、自分のイジン召喚権もマリョク配置権も0なら、自分のエンドフェイズが開始したときに戦場で発動する。これを破壊する。","legacyText":null,"imageUrl":"https://one-draw.jp/ijinden/cardlist/005/card/05_073.png","expansion":55,"rarity":1,"type":2,"level":5,"color":16,"term":0,"trait":0,"power":null,"legacy":0,"anyNumCopies":false,"orderTable":463,"orderDeck":348},</text:p>
          </table:table-cell>
          <table:table-cell table:number-columns-repeated="16356"/>
        </table:table-row>
        <table:table-row table:style-name="ro2">
          <table:table-cell table:style-name="ce11" office:value-type="float" office:value="464" calcext:value-type="float">
            <text:p>464</text:p>
          </table:table-cell>
          <table:table-cell table:style-name="ce11" office:value-type="float" office:value="330" calcext:value-type="float">
            <text:p>330</text:p>
          </table:table-cell>
          <table:table-cell table:formula="of:=CONCATENATE(&quot;2nd1-&quot;;TEXT([.D465];&quot;0&quot;))" office:value-type="string" office:string-value="2nd1-74" calcext:value-type="string">
            <text:p>2nd1-74</text:p>
          </table:table-cell>
          <table:table-cell office:value-type="float" office:value="74" calcext:value-type="float">
            <text:p>74</text:p>
          </table:table-cell>
          <table:table-cell office:value-type="string" calcext:value-type="string">
            <text:p>渡川の陣</text:p>
          </table:table-cell>
          <table:table-cell table:style-name="ce11" table:formula="of:=[.E465]" office:value-type="string" office:string-value="渡川の陣" calcext:value-type="string">
            <text:p>渡川の陣</text:p>
          </table:table-cell>
          <table:table-cell office:value-type="string" calcext:value-type="string">
            <text:p>わたりがわのじん</text:p>
          </table:table-cell>
          <table:table-cell table:style-name="ce11" office:value-type="string" calcext:value-type="string">
            <text:p>第５弾ブースターパック</text:p>
          </table:table-cell>
          <table:table-cell table:style-name="ce11" table:formula="of:=VLOOKUP([.H465];[$収録番号.$A$1:$収録番号.$B$10];2;0)" office:value-type="float" office:value="55" calcext:value-type="float">
            <text:p>55</text:p>
          </table:table-cell>
          <table:table-cell office:value-type="string" calcext:value-type="string">
            <text:p>N</text:p>
          </table:table-cell>
          <table:table-cell table:style-name="ce11" table:formula="of:=VLOOKUP([.J465];[$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65];[$種類番号.$A$1:$種類番号.$B$4];2;0)" office:value-type="float" office:value="2" calcext:value-type="float">
            <text:p>2</text:p>
          </table:table-cell>
          <table:table-cell office:value-type="string" calcext:value-type="string">
            <text:p>紫</text:p>
          </table:table-cell>
          <table:table-cell table:style-name="ce11" table:formula="of:=VLOOKUP([.N465];[$色番号.$A$1:$色番号.$B$10];2;0)" office:value-type="float" office:value="16" calcext:value-type="float">
            <text:p>16</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6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65];[$特性番号.$A$1:$特性番号.$B$8];2;0);0)" office:value-type="float" office:value="0" calcext:value-type="float">
            <text:p>0</text:p>
          </table:table-cell>
          <table:table-cell office:value-type="string" calcext:value-type="string">
            <text:p>この能力は、自分のエンドフェイズが開始したときに戦場で発動できる。自分の戦場のイジン1体を破壊する。¶この能力は、自分の戦場のイジンが破壊されたときに戦場で発動できる。相手の山札の上からカード1つを墓地に置く。</text:p>
          </table:table-cell>
          <table:table-cell table:style-name="ce25"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465];[$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74.png</text:p>
          </table:table-cell>
          <table:table-cell table:style-name="ce11" table:formula="of:=CONCATENATE([$JSON.$A$1];[.$C465];[$JSON.$B$1];[.$E465];[$JSON.$C$1];[.F465];[$JSON.$D$1];[.$G465];[$JSON.$E$1];IF(ISNA([.$T465]);&quot;null&quot;;&quot;&quot;&quot;&quot;&amp;[.$T465]&amp;&quot;&quot;&quot;&quot;);[$JSON.$F$1];[.$V465];[$JSON.$G$1];IF(ISNA([.$X465]);&quot;null&quot;;&quot;&quot;&quot;&quot;&amp;[.$X465]&amp;&quot;&quot;&quot;&quot;);[$JSON.$H$1];[.$AA465];[$JSON.$I$1];[.$I465];[$JSON.$J$1];[.K465];[$JSON.$K$1];[.$M465];[$JSON.$L$1];[.$P465];[$JSON.$M$1];[.$O465];[$JSON.$N$1];[.$S465];[$JSON.$O$1];[.$U465];[$JSON.$P$1];IF(ISNA([.$W465]);&quot;null&quot;;[.$W465]);[$JSON.$Q$1];[.$Y465];[$JSON.$R$1];IF([.$Z465];&quot;true&quot;;&quot;false&quot;);[$JSON.$S$1];[.$A465];[$JSON.$T$1];[.$B465];[$JSON.$U$1])" office:value-type="string" office:string-value="{&quot;id&quot;:&quot;2nd1-74&quot;,&quot;name&quot;:&quot;渡川の陣&quot;,&quot;displayName&quot;:&quot;渡川の陣&quot;,&quot;kana&quot;:&quot;わたりがわのじん&quot;,&quot;traitText&quot;:null,&quot;ruleText&quot;:&quot;この能力は、自分のエンドフェイズが開始したときに戦場で発動できる。自分の戦場のイジン1体を破壊する。¶この能力は、自分の戦場のイジンが破壊されたときに戦場で発動できる。相手の山札の上からカード1つを墓地に置く。&quot;,&quot;legacyText&quot;:null,&quot;imageUrl&quot;:&quot;https://one-draw.jp/ijinden/cardlist/005/card/05_074.png&quot;,&quot;expansion&quot;:55,&quot;rarity&quot;:1,&quot;type&quot;:2,&quot;level&quot;:3,&quot;color&quot;:16,&quot;term&quot;:0,&quot;trait&quot;:0,&quot;power&quot;:null,&quot;legacy&quot;:0,&quot;anyNumCopies&quot;:false,&quot;orderTable&quot;:464,&quot;orderDeck&quot;:330}," calcext:value-type="string">
            <text:p>{"id":"2nd1-74","name":"渡川の陣","displayName":"渡川の陣","kana":"わたりがわのじん","traitText":null,"ruleText":"この能力は、自分のエンドフェイズが開始したときに戦場で発動できる。自分の戦場のイジン1体を破壊する。¶この能力は、自分の戦場のイジンが破壊されたときに戦場で発動できる。相手の山札の上からカード1つを墓地に置く。","legacyText":null,"imageUrl":"https://one-draw.jp/ijinden/cardlist/005/card/05_074.png","expansion":55,"rarity":1,"type":2,"level":3,"color":16,"term":0,"trait":0,"power":null,"legacy":0,"anyNumCopies":false,"orderTable":464,"orderDeck":330},</text:p>
          </table:table-cell>
          <table:table-cell table:number-columns-repeated="16356"/>
        </table:table-row>
        <table:table-row table:style-name="ro2">
          <table:table-cell table:style-name="ce11" office:value-type="float" office:value="465" calcext:value-type="float">
            <text:p>465</text:p>
          </table:table-cell>
          <table:table-cell table:style-name="ce11" office:value-type="float" office:value="356" calcext:value-type="float">
            <text:p>356</text:p>
          </table:table-cell>
          <table:table-cell table:formula="of:=CONCATENATE(&quot;2nd1-&quot;;TEXT([.D466];&quot;0&quot;))" office:value-type="string" office:string-value="2nd1-75" calcext:value-type="string">
            <text:p>2nd1-75</text:p>
          </table:table-cell>
          <table:table-cell office:value-type="float" office:value="75" calcext:value-type="float">
            <text:p>75</text:p>
          </table:table-cell>
          <table:table-cell office:value-type="string" calcext:value-type="string">
            <text:p>モダンアートの殿堂</text:p>
          </table:table-cell>
          <table:table-cell table:style-name="ce11" table:formula="of:=[.E466]" office:value-type="string" office:string-value="モダンアートの殿堂" calcext:value-type="string">
            <text:p>モダンアートの殿堂</text:p>
          </table:table-cell>
          <table:table-cell office:value-type="string" calcext:value-type="string">
            <text:p>もだんあーとのでんどう</text:p>
          </table:table-cell>
          <table:table-cell table:style-name="ce11" office:value-type="string" calcext:value-type="string">
            <text:p>第５弾ブースターパック</text:p>
          </table:table-cell>
          <table:table-cell table:style-name="ce11" table:formula="of:=VLOOKUP([.H466];[$収録番号.$A$1:$収録番号.$B$10];2;0)" office:value-type="float" office:value="55" calcext:value-type="float">
            <text:p>55</text:p>
          </table:table-cell>
          <table:table-cell office:value-type="string" calcext:value-type="string">
            <text:p>N</text:p>
          </table:table-cell>
          <table:table-cell table:style-name="ce11" table:formula="of:=VLOOKUP([.J466];[$レアリティ番号.$A$1:$レアリティ番号.$B$4];2;0)" office:value-type="float" office:value="1" calcext:value-type="float">
            <text:p>1</text:p>
          </table:table-cell>
          <table:table-cell office:value-type="string" calcext:value-type="string">
            <text:p>ハイケイ</text:p>
          </table:table-cell>
          <table:table-cell table:style-name="ce11" table:formula="of:=VLOOKUP([.L466];[$種類番号.$A$1:$種類番号.$B$4];2;0)" office:value-type="float" office:value="2" calcext:value-type="float">
            <text:p>2</text:p>
          </table:table-cell>
          <table:table-cell office:value-type="string" calcext:value-type="string">
            <text:p>紫</text:p>
          </table:table-cell>
          <table:table-cell table:style-name="ce11" table:formula="of:=VLOOKUP([.N466];[$色番号.$A$1:$色番号.$B$10];2;0)" office:value-type="float" office:value="16" calcext:value-type="float">
            <text:p>16</text:p>
          </table:table-cell>
          <table:table-cell office:value-type="float" office:value="7" calcext:value-type="float">
            <text:p>7</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6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66];[$特性番号.$A$1:$特性番号.$B$8];2;0);0)" office:value-type="float" office:value="0" calcext:value-type="float">
            <text:p>0</text:p>
          </table:table-cell>
          <table:table-cell office:value-type="string" calcext:value-type="string">
            <text:p>この能力は戦場で効果を発揮する。自分と相手は『ドロー』効果で山札からカードを引く際、1つだけ多く引く。</text:p>
          </table:table-cell>
          <table:table-cell table:style-name="ce25"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11" table:formula="of:=IFERROR(VLOOKUP([.$X466];[$遺業能力番号.$A$1:$遺業能力番号.$B$9];2;0);0)" office:value-type="float" office:value="0" calcext:value-type="float">
            <text:p>0</text:p>
          </table:table-cell>
          <table:table-cell table:style-name="ce28" office:value-type="boolean" office:boolean-value="false" calcext:value-type="boolean">
            <text:p>FALSE</text:p>
          </table:table-cell>
          <table:table-cell office:value-type="string" calcext:value-type="string">
            <text:p>https://one-draw.jp/ijinden/cardlist/005/card/05_075.png</text:p>
          </table:table-cell>
          <table:table-cell table:style-name="ce11" table:formula="of:=CONCATENATE([$JSON.$A$1];[.$C466];[$JSON.$B$1];[.$E466];[$JSON.$C$1];[.F466];[$JSON.$D$1];[.$G466];[$JSON.$E$1];IF(ISNA([.$T466]);&quot;null&quot;;&quot;&quot;&quot;&quot;&amp;[.$T466]&amp;&quot;&quot;&quot;&quot;);[$JSON.$F$1];[.$V466];[$JSON.$G$1];IF(ISNA([.$X466]);&quot;null&quot;;&quot;&quot;&quot;&quot;&amp;[.$X466]&amp;&quot;&quot;&quot;&quot;);[$JSON.$H$1];[.$AA466];[$JSON.$I$1];[.$I466];[$JSON.$J$1];[.K466];[$JSON.$K$1];[.$M466];[$JSON.$L$1];[.$P466];[$JSON.$M$1];[.$O466];[$JSON.$N$1];[.$S466];[$JSON.$O$1];[.$U466];[$JSON.$P$1];IF(ISNA([.$W466]);&quot;null&quot;;[.$W466]);[$JSON.$Q$1];[.$Y466];[$JSON.$R$1];IF([.$Z466];&quot;true&quot;;&quot;false&quot;);[$JSON.$S$1];[.$A466];[$JSON.$T$1];[.$B466];[$JSON.$U$1])" office:value-type="string" office:string-value="{&quot;id&quot;:&quot;2nd1-75&quot;,&quot;name&quot;:&quot;モダンアートの殿堂&quot;,&quot;displayName&quot;:&quot;モダンアートの殿堂&quot;,&quot;kana&quot;:&quot;もだんあーとのでんどう&quot;,&quot;traitText&quot;:null,&quot;ruleText&quot;:&quot;この能力は戦場で効果を発揮する。自分と相手は『ドロー』効果で山札からカードを引く際、1つだけ多く引く。&quot;,&quot;legacyText&quot;:null,&quot;imageUrl&quot;:&quot;https://one-draw.jp/ijinden/cardlist/005/card/05_075.png&quot;,&quot;expansion&quot;:55,&quot;rarity&quot;:1,&quot;type&quot;:2,&quot;level&quot;:7,&quot;color&quot;:16,&quot;term&quot;:0,&quot;trait&quot;:0,&quot;power&quot;:null,&quot;legacy&quot;:0,&quot;anyNumCopies&quot;:false,&quot;orderTable&quot;:465,&quot;orderDeck&quot;:356}," calcext:value-type="string">
            <text:p>{"id":"2nd1-75","name":"モダンアートの殿堂","displayName":"モダンアートの殿堂","kana":"もだんあーとのでんどう","traitText":null,"ruleText":"この能力は戦場で効果を発揮する。自分と相手は『ドロー』効果で山札からカードを引く際、1つだけ多く引く。","legacyText":null,"imageUrl":"https://one-draw.jp/ijinden/cardlist/005/card/05_075.png","expansion":55,"rarity":1,"type":2,"level":7,"color":16,"term":0,"trait":0,"power":null,"legacy":0,"anyNumCopies":false,"orderTable":465,"orderDeck":356},</text:p>
          </table:table-cell>
          <table:table-cell table:number-columns-repeated="16356"/>
        </table:table-row>
        <table:table-row table:style-name="ro2">
          <table:table-cell table:style-name="ce11" office:value-type="float" office:value="466" calcext:value-type="float">
            <text:p>466</text:p>
          </table:table-cell>
          <table:table-cell table:style-name="ce11" office:value-type="float" office:value="388" calcext:value-type="float">
            <text:p>388</text:p>
          </table:table-cell>
          <table:table-cell table:formula="of:=CONCATENATE(&quot;2nd1-&quot;;TEXT([.D467];&quot;0&quot;))" office:value-type="string" office:string-value="2nd1-76" calcext:value-type="string">
            <text:p>2nd1-76</text:p>
          </table:table-cell>
          <table:table-cell office:value-type="float" office:value="76" calcext:value-type="float">
            <text:p>76</text:p>
          </table:table-cell>
          <table:table-cell office:value-type="string" calcext:value-type="string">
            <text:p>キリング</text:p>
          </table:table-cell>
          <table:table-cell table:style-name="ce11" table:formula="of:=[.E467]" office:value-type="string" office:string-value="キリング" calcext:value-type="string">
            <text:p>キリング</text:p>
          </table:table-cell>
          <table:table-cell office:value-type="string" calcext:value-type="string">
            <text:p>きりんぐ</text:p>
          </table:table-cell>
          <table:table-cell table:style-name="ce11" office:value-type="string" calcext:value-type="string">
            <text:p>第５弾ブースターパック</text:p>
          </table:table-cell>
          <table:table-cell table:style-name="ce11" table:formula="of:=VLOOKUP([.H467];[$収録番号.$A$1:$収録番号.$B$10];2;0)" office:value-type="float" office:value="55" calcext:value-type="float">
            <text:p>55</text:p>
          </table:table-cell>
          <table:table-cell office:value-type="string" calcext:value-type="string">
            <text:p>N</text:p>
          </table:table-cell>
          <table:table-cell table:style-name="ce11" table:formula="of:=VLOOKUP([.J467];[$レアリティ番号.$A$1:$レアリティ番号.$B$4];2;0)" office:value-type="float" office:value="1" calcext:value-type="float">
            <text:p>1</text:p>
          </table:table-cell>
          <table:table-cell office:value-type="string" calcext:value-type="string">
            <text:p>マホウ</text:p>
          </table:table-cell>
          <table:table-cell table:style-name="ce11" table:formula="of:=VLOOKUP([.L467];[$種類番号.$A$1:$種類番号.$B$4];2;0)" office:value-type="float" office:value="3" calcext:value-type="float">
            <text:p>3</text:p>
          </table:table-cell>
          <table:table-cell office:value-type="string" calcext:value-type="string">
            <text:p>赤</text:p>
          </table:table-cell>
          <table:table-cell table:style-name="ce11" table:formula="of:=VLOOKUP([.N467];[$色番号.$A$1:$色番号.$B$10];2;0)"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46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67];[$特性番号.$A$1:$特性番号.$B$8];2;0);0)" office:value-type="float" office:value="0" calcext:value-type="float">
            <text:p>0</text:p>
          </table:table-cell>
          <table:table-cell office:value-type="string" calcext:value-type="string">
            <text:p>この能力は、相手の戦場のイジン1体を指定して発動できる。そのイジンを破壊する。</text:p>
          </table:table-cell>
          <table:table-cell table:style-name="ce25" table:formula="of:=NA()" office:value-type="string" office:string-value="" calcext:value-type="error">
            <text:p>#N/A</text:p>
          </table:table-cell>
          <table:table-cell office:value-type="string" calcext:value-type="string">
            <text:p>冥府発動</text:p>
          </table:table-cell>
          <table:table-cell table:style-name="ce11" table:formula="of:=IFERROR(VLOOKUP([.$X467];[$遺業能力番号.$A$1:$遺業能力番号.$B$9];2;0);0)" office:value-type="float" office:value="2" calcext:value-type="float">
            <text:p>2</text:p>
          </table:table-cell>
          <table:table-cell table:style-name="ce28" office:value-type="boolean" office:boolean-value="false" calcext:value-type="boolean">
            <text:p>FALSE</text:p>
          </table:table-cell>
          <table:table-cell office:value-type="string" calcext:value-type="string">
            <text:p>https://one-draw.jp/ijinden/cardlist/005/card/05_076.png</text:p>
          </table:table-cell>
          <table:table-cell table:style-name="ce11" table:formula="of:=CONCATENATE([$JSON.$A$1];[.$C467];[$JSON.$B$1];[.$E467];[$JSON.$C$1];[.F467];[$JSON.$D$1];[.$G467];[$JSON.$E$1];IF(ISNA([.$T467]);&quot;null&quot;;&quot;&quot;&quot;&quot;&amp;[.$T467]&amp;&quot;&quot;&quot;&quot;);[$JSON.$F$1];[.$V467];[$JSON.$G$1];IF(ISNA([.$X467]);&quot;null&quot;;&quot;&quot;&quot;&quot;&amp;[.$X467]&amp;&quot;&quot;&quot;&quot;);[$JSON.$H$1];[.$AA467];[$JSON.$I$1];[.$I467];[$JSON.$J$1];[.K467];[$JSON.$K$1];[.$M467];[$JSON.$L$1];[.$P467];[$JSON.$M$1];[.$O467];[$JSON.$N$1];[.$S467];[$JSON.$O$1];[.$U467];[$JSON.$P$1];IF(ISNA([.$W467]);&quot;null&quot;;[.$W467]);[$JSON.$Q$1];[.$Y467];[$JSON.$R$1];IF([.$Z467];&quot;true&quot;;&quot;false&quot;);[$JSON.$S$1];[.$A467];[$JSON.$T$1];[.$B467];[$JSON.$U$1])" office:value-type="string" office:string-value="{&quot;id&quot;:&quot;2nd1-76&quot;,&quot;name&quot;:&quot;キリング&quot;,&quot;displayName&quot;:&quot;キリング&quot;,&quot;kana&quot;:&quot;きりんぐ&quot;,&quot;traitText&quot;:null,&quot;ruleText&quot;:&quot;この能力は、相手の戦場のイジン1体を指定して発動できる。そのイジンを破壊する。&quot;,&quot;legacyText&quot;:&quot;冥府発動&quot;,&quot;imageUrl&quot;:&quot;https://one-draw.jp/ijinden/cardlist/005/card/05_076.png&quot;,&quot;expansion&quot;:55,&quot;rarity&quot;:1,&quot;type&quot;:3,&quot;level&quot;:3,&quot;color&quot;:1,&quot;term&quot;:0,&quot;trait&quot;:0,&quot;power&quot;:null,&quot;legacy&quot;:2,&quot;anyNumCopies&quot;:false,&quot;orderTable&quot;:466,&quot;orderDeck&quot;:388}," calcext:value-type="string">
            <text:p>{"id":"2nd1-76","name":"キリング","displayName":"キリング","kana":"きりんぐ","traitText":null,"ruleText":"この能力は、相手の戦場のイジン1体を指定して発動できる。そのイジンを破壊する。","legacyText":"冥府発動","imageUrl":"https://one-draw.jp/ijinden/cardlist/005/card/05_076.png","expansion":55,"rarity":1,"type":3,"level":3,"color":1,"term":0,"trait":0,"power":null,"legacy":2,"anyNumCopies":false,"orderTable":466,"orderDeck":388},</text:p>
          </table:table-cell>
          <table:table-cell table:number-columns-repeated="16356"/>
        </table:table-row>
        <table:table-row table:style-name="ro2">
          <table:table-cell table:style-name="ce11" office:value-type="float" office:value="467" calcext:value-type="float">
            <text:p>467</text:p>
          </table:table-cell>
          <table:table-cell table:style-name="ce11" office:value-type="float" office:value="413" calcext:value-type="float">
            <text:p>413</text:p>
          </table:table-cell>
          <table:table-cell table:formula="of:=CONCATENATE(&quot;2nd1-&quot;;TEXT([.D468];&quot;0&quot;))" office:value-type="string" office:string-value="2nd1-77" calcext:value-type="string">
            <text:p>2nd1-77</text:p>
          </table:table-cell>
          <table:table-cell office:value-type="float" office:value="77" calcext:value-type="float">
            <text:p>77</text:p>
          </table:table-cell>
          <table:table-cell office:value-type="string" calcext:value-type="string">
            <text:p>ブリッツ</text:p>
          </table:table-cell>
          <table:table-cell table:style-name="ce11" table:formula="of:=[.E468]" office:value-type="string" office:string-value="ブリッツ" calcext:value-type="string">
            <text:p>ブリッツ</text:p>
          </table:table-cell>
          <table:table-cell office:value-type="string" calcext:value-type="string">
            <text:p>ぶりっつ</text:p>
          </table:table-cell>
          <table:table-cell table:style-name="ce11" office:value-type="string" calcext:value-type="string">
            <text:p>第５弾ブースターパック</text:p>
          </table:table-cell>
          <table:table-cell table:style-name="ce11" table:formula="of:=VLOOKUP([.H468];[$収録番号.$A$1:$収録番号.$B$10];2;0)" office:value-type="float" office:value="55" calcext:value-type="float">
            <text:p>55</text:p>
          </table:table-cell>
          <table:table-cell office:value-type="string" calcext:value-type="string">
            <text:p>R</text:p>
          </table:table-cell>
          <table:table-cell table:style-name="ce11" table:formula="of:=VLOOKUP([.J468];[$レアリティ番号.$A$1:$レアリティ番号.$B$4];2;0)" office:value-type="float" office:value="2" calcext:value-type="float">
            <text:p>2</text:p>
          </table:table-cell>
          <table:table-cell office:value-type="string" calcext:value-type="string">
            <text:p>マホウ</text:p>
          </table:table-cell>
          <table:table-cell table:style-name="ce11" table:formula="of:=VLOOKUP([.L468];[$種類番号.$A$1:$種類番号.$B$4];2;0)" office:value-type="float" office:value="3" calcext:value-type="float">
            <text:p>3</text:p>
          </table:table-cell>
          <table:table-cell office:value-type="string" calcext:value-type="string">
            <text:p>赤</text:p>
          </table:table-cell>
          <table:table-cell table:style-name="ce11" table:formula="of:=VLOOKUP([.N468];[$色番号.$A$1:$色番号.$B$10];2;0)"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46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68];[$特性番号.$A$1:$特性番号.$B$8];2;0);0)" office:value-type="float" office:value="0" calcext:value-type="float">
            <text:p>0</text:p>
          </table:table-cell>
          <table:table-cell office:value-type="string" calcext:value-type="string">
            <text:p>この能力は、自分の手札のレベル5以下のイジン1体を相手に見せて発動できる。そのイジンを、このターンに限り「即応」を得ている状態で戦場に置く。</text:p>
          </table:table-cell>
          <table:table-cell table:style-name="ce25" table:formula="of:=NA()" office:value-type="string" office:string-value="" calcext:value-type="error">
            <text:p>#N/A</text:p>
          </table:table-cell>
          <table:table-cell office:value-type="string" calcext:value-type="string">
            <text:p>冥府発動</text:p>
          </table:table-cell>
          <table:table-cell table:style-name="ce11" table:formula="of:=IFERROR(VLOOKUP([.$X468];[$遺業能力番号.$A$1:$遺業能力番号.$B$9];2;0);0)" office:value-type="float" office:value="2" calcext:value-type="float">
            <text:p>2</text:p>
          </table:table-cell>
          <table:table-cell table:style-name="ce28" office:value-type="boolean" office:boolean-value="false" calcext:value-type="boolean">
            <text:p>FALSE</text:p>
          </table:table-cell>
          <table:table-cell office:value-type="string" calcext:value-type="string">
            <text:p>https://one-draw.jp/ijinden/cardlist/005/card/05_077.png</text:p>
          </table:table-cell>
          <table:table-cell table:style-name="ce11" table:formula="of:=CONCATENATE([$JSON.$A$1];[.$C468];[$JSON.$B$1];[.$E468];[$JSON.$C$1];[.F468];[$JSON.$D$1];[.$G468];[$JSON.$E$1];IF(ISNA([.$T468]);&quot;null&quot;;&quot;&quot;&quot;&quot;&amp;[.$T468]&amp;&quot;&quot;&quot;&quot;);[$JSON.$F$1];[.$V468];[$JSON.$G$1];IF(ISNA([.$X468]);&quot;null&quot;;&quot;&quot;&quot;&quot;&amp;[.$X468]&amp;&quot;&quot;&quot;&quot;);[$JSON.$H$1];[.$AA468];[$JSON.$I$1];[.$I468];[$JSON.$J$1];[.K468];[$JSON.$K$1];[.$M468];[$JSON.$L$1];[.$P468];[$JSON.$M$1];[.$O468];[$JSON.$N$1];[.$S468];[$JSON.$O$1];[.$U468];[$JSON.$P$1];IF(ISNA([.$W468]);&quot;null&quot;;[.$W468]);[$JSON.$Q$1];[.$Y468];[$JSON.$R$1];IF([.$Z468];&quot;true&quot;;&quot;false&quot;);[$JSON.$S$1];[.$A468];[$JSON.$T$1];[.$B468];[$JSON.$U$1])" office:value-type="string" office:string-value="{&quot;id&quot;:&quot;2nd1-77&quot;,&quot;name&quot;:&quot;ブリッツ&quot;,&quot;displayName&quot;:&quot;ブリッツ&quot;,&quot;kana&quot;:&quot;ぶりっつ&quot;,&quot;traitText&quot;:null,&quot;ruleText&quot;:&quot;この能力は、自分の手札のレベル5以下のイジン1体を相手に見せて発動できる。そのイジンを、このターンに限り「即応」を得ている状態で戦場に置く。&quot;,&quot;legacyText&quot;:&quot;冥府発動&quot;,&quot;imageUrl&quot;:&quot;https://one-draw.jp/ijinden/cardlist/005/card/05_077.png&quot;,&quot;expansion&quot;:55,&quot;rarity&quot;:2,&quot;type&quot;:3,&quot;level&quot;:5,&quot;color&quot;:1,&quot;term&quot;:0,&quot;trait&quot;:0,&quot;power&quot;:null,&quot;legacy&quot;:2,&quot;anyNumCopies&quot;:false,&quot;orderTable&quot;:467,&quot;orderDeck&quot;:413}," calcext:value-type="string">
            <text:p>{"id":"2nd1-77","name":"ブリッツ","displayName":"ブリッツ","kana":"ぶりっつ","traitText":null,"ruleText":"この能力は、自分の手札のレベル5以下のイジン1体を相手に見せて発動できる。そのイジンを、このターンに限り「即応」を得ている状態で戦場に置く。","legacyText":"冥府発動","imageUrl":"https://one-draw.jp/ijinden/cardlist/005/card/05_077.png","expansion":55,"rarity":2,"type":3,"level":5,"color":1,"term":0,"trait":0,"power":null,"legacy":2,"anyNumCopies":false,"orderTable":467,"orderDeck":413},</text:p>
          </table:table-cell>
          <table:table-cell table:number-columns-repeated="16356"/>
        </table:table-row>
        <table:table-row table:style-name="ro2">
          <table:table-cell table:style-name="ce11" office:value-type="float" office:value="468" calcext:value-type="float">
            <text:p>468</text:p>
          </table:table-cell>
          <table:table-cell table:style-name="ce11" office:value-type="float" office:value="387" calcext:value-type="float">
            <text:p>387</text:p>
          </table:table-cell>
          <table:table-cell table:formula="of:=CONCATENATE(&quot;2nd1-&quot;;TEXT([.D469];&quot;0&quot;))" office:value-type="string" office:string-value="2nd1-78" calcext:value-type="string">
            <text:p>2nd1-78</text:p>
          </table:table-cell>
          <table:table-cell office:value-type="float" office:value="78" calcext:value-type="float">
            <text:p>78</text:p>
          </table:table-cell>
          <table:table-cell office:value-type="string" calcext:value-type="string">
            <text:p>ロイヤリティ</text:p>
          </table:table-cell>
          <table:table-cell office:value-type="string" calcext:value-type="string">
            <text:p>ロイヤリティ (第5弾)</text:p>
          </table:table-cell>
          <table:table-cell office:value-type="string" calcext:value-type="string">
            <text:p>ろいやりてぃ</text:p>
          </table:table-cell>
          <table:table-cell table:style-name="ce11" office:value-type="string" calcext:value-type="string">
            <text:p>第５弾ブースターパック</text:p>
          </table:table-cell>
          <table:table-cell table:style-name="ce11" table:formula="of:=VLOOKUP([.H469];[$収録番号.$A$1:$収録番号.$B$10];2;0)" office:value-type="float" office:value="55" calcext:value-type="float">
            <text:p>55</text:p>
          </table:table-cell>
          <table:table-cell office:value-type="string" calcext:value-type="string">
            <text:p>N</text:p>
          </table:table-cell>
          <table:table-cell table:style-name="ce11" table:formula="of:=VLOOKUP([.J469];[$レアリティ番号.$A$1:$レアリティ番号.$B$4];2;0)" office:value-type="float" office:value="1" calcext:value-type="float">
            <text:p>1</text:p>
          </table:table-cell>
          <table:table-cell office:value-type="string" calcext:value-type="string">
            <text:p>マホウ</text:p>
          </table:table-cell>
          <table:table-cell table:style-name="ce11" table:formula="of:=VLOOKUP([.L469];[$種類番号.$A$1:$種類番号.$B$4];2;0)" office:value-type="float" office:value="3" calcext:value-type="float">
            <text:p>3</text:p>
          </table:table-cell>
          <table:table-cell office:value-type="string" calcext:value-type="string">
            <text:p>赤</text:p>
          </table:table-cell>
          <table:table-cell table:style-name="ce11" table:formula="of:=VLOOKUP([.N469];[$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46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69];[$特性番号.$A$1:$特性番号.$B$8];2;0);0)" office:value-type="float" office:value="0" calcext:value-type="float">
            <text:p>0</text:p>
          </table:table-cell>
          <table:table-cell office:value-type="string" calcext:value-type="string">
            <text:p>この能力は、自分の戦場の「剣術」イジンかガーディアン1体を指定して発動できる。そのカードを墓地に置いて、3ドローする。</text:p>
          </table:table-cell>
          <table:table-cell table:style-name="ce25" table:formula="of:=NA()" office:value-type="string" office:string-value="" calcext:value-type="error">
            <text:p>#N/A</text:p>
          </table:table-cell>
          <table:table-cell office:value-type="string" calcext:value-type="string">
            <text:p>冥府発動</text:p>
          </table:table-cell>
          <table:table-cell table:style-name="ce11" table:formula="of:=IFERROR(VLOOKUP([.$X469];[$遺業能力番号.$A$1:$遺業能力番号.$B$9];2;0);0)" office:value-type="float" office:value="2" calcext:value-type="float">
            <text:p>2</text:p>
          </table:table-cell>
          <table:table-cell table:style-name="ce28" office:value-type="boolean" office:boolean-value="false" calcext:value-type="boolean">
            <text:p>FALSE</text:p>
          </table:table-cell>
          <table:table-cell office:value-type="string" calcext:value-type="string">
            <text:p>https://one-draw.jp/ijinden/cardlist/005/card/05_078.png</text:p>
          </table:table-cell>
          <table:table-cell table:style-name="ce11" table:formula="of:=CONCATENATE([$JSON.$A$1];[.$C469];[$JSON.$B$1];[.$E469];[$JSON.$C$1];[.F469];[$JSON.$D$1];[.$G469];[$JSON.$E$1];IF(ISNA([.$T469]);&quot;null&quot;;&quot;&quot;&quot;&quot;&amp;[.$T469]&amp;&quot;&quot;&quot;&quot;);[$JSON.$F$1];[.$V469];[$JSON.$G$1];IF(ISNA([.$X469]);&quot;null&quot;;&quot;&quot;&quot;&quot;&amp;[.$X469]&amp;&quot;&quot;&quot;&quot;);[$JSON.$H$1];[.$AA469];[$JSON.$I$1];[.$I469];[$JSON.$J$1];[.K469];[$JSON.$K$1];[.$M469];[$JSON.$L$1];[.$P469];[$JSON.$M$1];[.$O469];[$JSON.$N$1];[.$S469];[$JSON.$O$1];[.$U469];[$JSON.$P$1];IF(ISNA([.$W469]);&quot;null&quot;;[.$W469]);[$JSON.$Q$1];[.$Y469];[$JSON.$R$1];IF([.$Z469];&quot;true&quot;;&quot;false&quot;);[$JSON.$S$1];[.$A469];[$JSON.$T$1];[.$B469];[$JSON.$U$1])" office:value-type="string" office:string-value="{&quot;id&quot;:&quot;2nd1-78&quot;,&quot;name&quot;:&quot;ロイヤリティ&quot;,&quot;displayName&quot;:&quot;ロイヤリティ (第5弾)&quot;,&quot;kana&quot;:&quot;ろいやりてぃ&quot;,&quot;traitText&quot;:null,&quot;ruleText&quot;:&quot;この能力は、自分の戦場の「剣術」イジンかガーディアン1体を指定して発動できる。そのカードを墓地に置いて、3ドローする。&quot;,&quot;legacyText&quot;:&quot;冥府発動&quot;,&quot;imageUrl&quot;:&quot;https://one-draw.jp/ijinden/cardlist/005/card/05_078.png&quot;,&quot;expansion&quot;:55,&quot;rarity&quot;:1,&quot;type&quot;:3,&quot;level&quot;:3,&quot;color&quot;:1,&quot;term&quot;:0,&quot;trait&quot;:0,&quot;power&quot;:null,&quot;legacy&quot;:2,&quot;anyNumCopies&quot;:false,&quot;orderTable&quot;:468,&quot;orderDeck&quot;:387}," calcext:value-type="string">
            <text:p>{"id":"2nd1-78","name":"ロイヤリティ","displayName":"ロイヤリティ (第5弾)","kana":"ろいやりてぃ","traitText":null,"ruleText":"この能力は、自分の戦場の「剣術」イジンかガーディアン1体を指定して発動できる。そのカードを墓地に置いて、3ドローする。","legacyText":"冥府発動","imageUrl":"https://one-draw.jp/ijinden/cardlist/005/card/05_078.png","expansion":55,"rarity":1,"type":3,"level":3,"color":1,"term":0,"trait":0,"power":null,"legacy":2,"anyNumCopies":false,"orderTable":468,"orderDeck":387},</text:p>
          </table:table-cell>
          <table:table-cell table:number-columns-repeated="16356"/>
        </table:table-row>
        <table:table-row table:style-name="ro2">
          <table:table-cell table:style-name="ce11" office:value-type="float" office:value="469" calcext:value-type="float">
            <text:p>469</text:p>
          </table:table-cell>
          <table:table-cell table:style-name="ce11" office:value-type="float" office:value="377" calcext:value-type="float">
            <text:p>377</text:p>
          </table:table-cell>
          <table:table-cell table:formula="of:=CONCATENATE(&quot;2nd1-&quot;;TEXT([.D470];&quot;0&quot;))" office:value-type="string" office:string-value="2nd1-79" calcext:value-type="string">
            <text:p>2nd1-79</text:p>
          </table:table-cell>
          <table:table-cell office:value-type="float" office:value="79" calcext:value-type="float">
            <text:p>79</text:p>
          </table:table-cell>
          <table:table-cell office:value-type="string" calcext:value-type="string">
            <text:p>ワールド</text:p>
          </table:table-cell>
          <table:table-cell table:style-name="ce11" table:formula="of:=[.E470]" office:value-type="string" office:string-value="ワールド" calcext:value-type="string">
            <text:p>ワールド</text:p>
          </table:table-cell>
          <table:table-cell office:value-type="string" calcext:value-type="string">
            <text:p>わーるど</text:p>
          </table:table-cell>
          <table:table-cell table:style-name="ce11" office:value-type="string" calcext:value-type="string">
            <text:p>第５弾ブースターパック</text:p>
          </table:table-cell>
          <table:table-cell table:style-name="ce11" table:formula="of:=VLOOKUP([.H470];[$収録番号.$A$1:$収録番号.$B$10];2;0)" office:value-type="float" office:value="55" calcext:value-type="float">
            <text:p>55</text:p>
          </table:table-cell>
          <table:table-cell office:value-type="string" calcext:value-type="string">
            <text:p>R</text:p>
          </table:table-cell>
          <table:table-cell table:style-name="ce11" table:formula="of:=VLOOKUP([.J470];[$レアリティ番号.$A$1:$レアリティ番号.$B$4];2;0)" office:value-type="float" office:value="2" calcext:value-type="float">
            <text:p>2</text:p>
          </table:table-cell>
          <table:table-cell office:value-type="string" calcext:value-type="string">
            <text:p>マホウ</text:p>
          </table:table-cell>
          <table:table-cell table:style-name="ce11" table:formula="of:=VLOOKUP([.L470];[$種類番号.$A$1:$種類番号.$B$4];2;0)" office:value-type="float" office:value="3" calcext:value-type="float">
            <text:p>3</text:p>
          </table:table-cell>
          <table:table-cell office:value-type="string" calcext:value-type="string">
            <text:p>青</text:p>
          </table:table-cell>
          <table:table-cell table:style-name="ce11" table:formula="of:=VLOOKUP([.N470];[$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47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70];[$特性番号.$A$1:$特性番号.$B$8];2;0);0)" office:value-type="float" office:value="0" calcext:value-type="float">
            <text:p>0</text:p>
          </table:table-cell>
          <table:table-cell office:value-type="string" calcext:value-type="string">
            <text:p>この能力は、相手の魔力ゾーンのマリョク1つを指定して発動できる。そのマリョクを裏にする。</text:p>
          </table:table-cell>
          <table:table-cell table:style-name="ce25" table:formula="of:=NA()" office:value-type="string" office:string-value="" calcext:value-type="error">
            <text:p>#N/A</text:p>
          </table:table-cell>
          <table:table-cell office:value-type="string" calcext:value-type="string">
            <text:p>冥府発動</text:p>
          </table:table-cell>
          <table:table-cell table:style-name="ce11" table:formula="of:=IFERROR(VLOOKUP([.$X470];[$遺業能力番号.$A$1:$遺業能力番号.$B$9];2;0);0)" office:value-type="float" office:value="2" calcext:value-type="float">
            <text:p>2</text:p>
          </table:table-cell>
          <table:table-cell table:style-name="ce28" office:value-type="boolean" office:boolean-value="false" calcext:value-type="boolean">
            <text:p>FALSE</text:p>
          </table:table-cell>
          <table:table-cell office:value-type="string" calcext:value-type="string">
            <text:p>https://one-draw.jp/ijinden/cardlist/005/card/05_079.png</text:p>
          </table:table-cell>
          <table:table-cell table:style-name="ce11" table:formula="of:=CONCATENATE([$JSON.$A$1];[.$C470];[$JSON.$B$1];[.$E470];[$JSON.$C$1];[.F470];[$JSON.$D$1];[.$G470];[$JSON.$E$1];IF(ISNA([.$T470]);&quot;null&quot;;&quot;&quot;&quot;&quot;&amp;[.$T470]&amp;&quot;&quot;&quot;&quot;);[$JSON.$F$1];[.$V470];[$JSON.$G$1];IF(ISNA([.$X470]);&quot;null&quot;;&quot;&quot;&quot;&quot;&amp;[.$X470]&amp;&quot;&quot;&quot;&quot;);[$JSON.$H$1];[.$AA470];[$JSON.$I$1];[.$I470];[$JSON.$J$1];[.K470];[$JSON.$K$1];[.$M470];[$JSON.$L$1];[.$P470];[$JSON.$M$1];[.$O470];[$JSON.$N$1];[.$S470];[$JSON.$O$1];[.$U470];[$JSON.$P$1];IF(ISNA([.$W470]);&quot;null&quot;;[.$W470]);[$JSON.$Q$1];[.$Y470];[$JSON.$R$1];IF([.$Z470];&quot;true&quot;;&quot;false&quot;);[$JSON.$S$1];[.$A470];[$JSON.$T$1];[.$B470];[$JSON.$U$1])" office:value-type="string" office:string-value="{&quot;id&quot;:&quot;2nd1-79&quot;,&quot;name&quot;:&quot;ワールド&quot;,&quot;displayName&quot;:&quot;ワールド&quot;,&quot;kana&quot;:&quot;わーるど&quot;,&quot;traitText&quot;:null,&quot;ruleText&quot;:&quot;この能力は、相手の魔力ゾーンのマリョク1つを指定して発動できる。そのマリョクを裏にする。&quot;,&quot;legacyText&quot;:&quot;冥府発動&quot;,&quot;imageUrl&quot;:&quot;https://one-draw.jp/ijinden/cardlist/005/card/05_079.png&quot;,&quot;expansion&quot;:55,&quot;rarity&quot;:2,&quot;type&quot;:3,&quot;level&quot;:2,&quot;color&quot;:2,&quot;term&quot;:0,&quot;trait&quot;:0,&quot;power&quot;:null,&quot;legacy&quot;:2,&quot;anyNumCopies&quot;:false,&quot;orderTable&quot;:469,&quot;orderDeck&quot;:377}," calcext:value-type="string">
            <text:p>{"id":"2nd1-79","name":"ワールド","displayName":"ワールド","kana":"わーるど","traitText":null,"ruleText":"この能力は、相手の魔力ゾーンのマリョク1つを指定して発動できる。そのマリョクを裏にする。","legacyText":"冥府発動","imageUrl":"https://one-draw.jp/ijinden/cardlist/005/card/05_079.png","expansion":55,"rarity":2,"type":3,"level":2,"color":2,"term":0,"trait":0,"power":null,"legacy":2,"anyNumCopies":false,"orderTable":469,"orderDeck":377},</text:p>
          </table:table-cell>
          <table:table-cell table:number-columns-repeated="16356"/>
        </table:table-row>
        <table:table-row table:style-name="ro2">
          <table:table-cell table:style-name="ce11" office:value-type="float" office:value="470" calcext:value-type="float">
            <text:p>470</text:p>
          </table:table-cell>
          <table:table-cell table:style-name="ce11" office:value-type="float" office:value="405" calcext:value-type="float">
            <text:p>405</text:p>
          </table:table-cell>
          <table:table-cell table:formula="of:=CONCATENATE(&quot;2nd1-&quot;;TEXT([.D471];&quot;0&quot;))" office:value-type="string" office:string-value="2nd1-80" calcext:value-type="string">
            <text:p>2nd1-80</text:p>
          </table:table-cell>
          <table:table-cell office:value-type="float" office:value="80" calcext:value-type="float">
            <text:p>80</text:p>
          </table:table-cell>
          <table:table-cell office:value-type="string" calcext:value-type="string">
            <text:p>ハリケーン</text:p>
          </table:table-cell>
          <table:table-cell table:style-name="ce11" table:formula="of:=[.E471]" office:value-type="string" office:string-value="ハリケーン" calcext:value-type="string">
            <text:p>ハリケーン</text:p>
          </table:table-cell>
          <table:table-cell office:value-type="string" calcext:value-type="string">
            <text:p>はりけーん</text:p>
          </table:table-cell>
          <table:table-cell table:style-name="ce11" office:value-type="string" calcext:value-type="string">
            <text:p>第５弾ブースターパック</text:p>
          </table:table-cell>
          <table:table-cell table:style-name="ce11" table:formula="of:=VLOOKUP([.H471];[$収録番号.$A$1:$収録番号.$B$10];2;0)" office:value-type="float" office:value="55" calcext:value-type="float">
            <text:p>55</text:p>
          </table:table-cell>
          <table:table-cell office:value-type="string" calcext:value-type="string">
            <text:p>N</text:p>
          </table:table-cell>
          <table:table-cell table:style-name="ce11" table:formula="of:=VLOOKUP([.J471];[$レアリティ番号.$A$1:$レアリティ番号.$B$4];2;0)" office:value-type="float" office:value="1" calcext:value-type="float">
            <text:p>1</text:p>
          </table:table-cell>
          <table:table-cell office:value-type="string" calcext:value-type="string">
            <text:p>マホウ</text:p>
          </table:table-cell>
          <table:table-cell table:style-name="ce11" table:formula="of:=VLOOKUP([.L471];[$種類番号.$A$1:$種類番号.$B$4];2;0)" office:value-type="float" office:value="3" calcext:value-type="float">
            <text:p>3</text:p>
          </table:table-cell>
          <table:table-cell office:value-type="string" calcext:value-type="string">
            <text:p>青</text:p>
          </table:table-cell>
          <table:table-cell table:style-name="ce11" table:formula="of:=VLOOKUP([.N471];[$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47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71];[$特性番号.$A$1:$特性番号.$B$8];2;0);0)" office:value-type="float" office:value="0" calcext:value-type="float">
            <text:p>0</text:p>
          </table:table-cell>
          <table:table-cell office:value-type="string" calcext:value-type="string">
            <text:p>この能力は、自分か相手の戦場のイジン1体を指定して発動できる。そのイジンが寝ているなら、そのイジンを裏にして山札の上に戻す。そうでなければ、そのイジンを手札に戻す。</text:p>
          </table:table-cell>
          <table:table-cell table:style-name="ce25" table:formula="of:=NA()" office:value-type="string" office:string-value="" calcext:value-type="error">
            <text:p>#N/A</text:p>
          </table:table-cell>
          <table:table-cell office:value-type="string" calcext:value-type="string">
            <text:p>冥府発動</text:p>
          </table:table-cell>
          <table:table-cell table:style-name="ce11" table:formula="of:=IFERROR(VLOOKUP([.$X471];[$遺業能力番号.$A$1:$遺業能力番号.$B$9];2;0);0)" office:value-type="float" office:value="2" calcext:value-type="float">
            <text:p>2</text:p>
          </table:table-cell>
          <table:table-cell table:style-name="ce28" office:value-type="boolean" office:boolean-value="false" calcext:value-type="boolean">
            <text:p>FALSE</text:p>
          </table:table-cell>
          <table:table-cell office:value-type="string" calcext:value-type="string">
            <text:p>https://one-draw.jp/ijinden/cardlist/005/card/05_080.png</text:p>
          </table:table-cell>
          <table:table-cell table:style-name="ce11" table:formula="of:=CONCATENATE([$JSON.$A$1];[.$C471];[$JSON.$B$1];[.$E471];[$JSON.$C$1];[.F471];[$JSON.$D$1];[.$G471];[$JSON.$E$1];IF(ISNA([.$T471]);&quot;null&quot;;&quot;&quot;&quot;&quot;&amp;[.$T471]&amp;&quot;&quot;&quot;&quot;);[$JSON.$F$1];[.$V471];[$JSON.$G$1];IF(ISNA([.$X471]);&quot;null&quot;;&quot;&quot;&quot;&quot;&amp;[.$X471]&amp;&quot;&quot;&quot;&quot;);[$JSON.$H$1];[.$AA471];[$JSON.$I$1];[.$I471];[$JSON.$J$1];[.K471];[$JSON.$K$1];[.$M471];[$JSON.$L$1];[.$P471];[$JSON.$M$1];[.$O471];[$JSON.$N$1];[.$S471];[$JSON.$O$1];[.$U471];[$JSON.$P$1];IF(ISNA([.$W471]);&quot;null&quot;;[.$W471]);[$JSON.$Q$1];[.$Y471];[$JSON.$R$1];IF([.$Z471];&quot;true&quot;;&quot;false&quot;);[$JSON.$S$1];[.$A471];[$JSON.$T$1];[.$B471];[$JSON.$U$1])" office:value-type="string" office:string-value="{&quot;id&quot;:&quot;2nd1-80&quot;,&quot;name&quot;:&quot;ハリケーン&quot;,&quot;displayName&quot;:&quot;ハリケーン&quot;,&quot;kana&quot;:&quot;はりけーん&quot;,&quot;traitText&quot;:null,&quot;ruleText&quot;:&quot;この能力は、自分か相手の戦場のイジン1体を指定して発動できる。そのイジンが寝ているなら、そのイジンを裏にして山札の上に戻す。そうでなければ、そのイジンを手札に戻す。&quot;,&quot;legacyText&quot;:&quot;冥府発動&quot;,&quot;imageUrl&quot;:&quot;https://one-draw.jp/ijinden/cardlist/005/card/05_080.png&quot;,&quot;expansion&quot;:55,&quot;rarity&quot;:1,&quot;type&quot;:3,&quot;level&quot;:4,&quot;color&quot;:2,&quot;term&quot;:0,&quot;trait&quot;:0,&quot;power&quot;:null,&quot;legacy&quot;:2,&quot;anyNumCopies&quot;:false,&quot;orderTable&quot;:470,&quot;orderDeck&quot;:405}," calcext:value-type="string">
            <text:p>{"id":"2nd1-80","name":"ハリケーン","displayName":"ハリケーン","kana":"はりけーん","traitText":null,"ruleText":"この能力は、自分か相手の戦場のイジン1体を指定して発動できる。そのイジンが寝ているなら、そのイジンを裏にして山札の上に戻す。そうでなければ、そのイジンを手札に戻す。","legacyText":"冥府発動","imageUrl":"https://one-draw.jp/ijinden/cardlist/005/card/05_080.png","expansion":55,"rarity":1,"type":3,"level":4,"color":2,"term":0,"trait":0,"power":null,"legacy":2,"anyNumCopies":false,"orderTable":470,"orderDeck":405},</text:p>
          </table:table-cell>
          <table:table-cell table:number-columns-repeated="16356"/>
        </table:table-row>
        <table:table-row table:style-name="ro2">
          <table:table-cell table:style-name="ce11" office:value-type="float" office:value="471" calcext:value-type="float">
            <text:p>471</text:p>
          </table:table-cell>
          <table:table-cell table:style-name="ce11" office:value-type="float" office:value="391" calcext:value-type="float">
            <text:p>391</text:p>
          </table:table-cell>
          <table:table-cell table:formula="of:=CONCATENATE(&quot;2nd1-&quot;;TEXT([.D472];&quot;0&quot;))" office:value-type="string" office:string-value="2nd1-81" calcext:value-type="string">
            <text:p>2nd1-81</text:p>
          </table:table-cell>
          <table:table-cell office:value-type="float" office:value="81" calcext:value-type="float">
            <text:p>81</text:p>
          </table:table-cell>
          <table:table-cell office:value-type="string" calcext:value-type="string">
            <text:p>ドローイング</text:p>
          </table:table-cell>
          <table:table-cell office:value-type="string" calcext:value-type="string">
            <text:p>ドローイング (第5弾)</text:p>
          </table:table-cell>
          <table:table-cell office:value-type="string" calcext:value-type="string">
            <text:p>どろーいんぐ</text:p>
          </table:table-cell>
          <table:table-cell table:style-name="ce11" office:value-type="string" calcext:value-type="string">
            <text:p>第５弾ブースターパック</text:p>
          </table:table-cell>
          <table:table-cell table:style-name="ce11" table:formula="of:=VLOOKUP([.H472];[$収録番号.$A$1:$収録番号.$B$10];2;0)" office:value-type="float" office:value="55" calcext:value-type="float">
            <text:p>55</text:p>
          </table:table-cell>
          <table:table-cell office:value-type="string" calcext:value-type="string">
            <text:p>N</text:p>
          </table:table-cell>
          <table:table-cell table:style-name="ce11" table:formula="of:=VLOOKUP([.J472];[$レアリティ番号.$A$1:$レアリティ番号.$B$4];2;0)" office:value-type="float" office:value="1" calcext:value-type="float">
            <text:p>1</text:p>
          </table:table-cell>
          <table:table-cell office:value-type="string" calcext:value-type="string">
            <text:p>マホウ</text:p>
          </table:table-cell>
          <table:table-cell table:style-name="ce11" table:formula="of:=VLOOKUP([.L472];[$種類番号.$A$1:$種類番号.$B$4];2;0)" office:value-type="float" office:value="3" calcext:value-type="float">
            <text:p>3</text:p>
          </table:table-cell>
          <table:table-cell office:value-type="string" calcext:value-type="string">
            <text:p>青</text:p>
          </table:table-cell>
          <table:table-cell table:style-name="ce11" table:formula="of:=VLOOKUP([.N472];[$色番号.$A$1:$色番号.$B$10];2;0)"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47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72];[$特性番号.$A$1:$特性番号.$B$8];2;0);0)" office:value-type="float" office:value="0" calcext:value-type="float">
            <text:p>0</text:p>
          </table:table-cell>
          <table:table-cell office:value-type="string" calcext:value-type="string">
            <text:p>2ドローする。</text:p>
          </table:table-cell>
          <table:table-cell table:style-name="ce25" table:formula="of:=NA()" office:value-type="string" office:string-value="" calcext:value-type="error">
            <text:p>#N/A</text:p>
          </table:table-cell>
          <table:table-cell office:value-type="string" calcext:value-type="string">
            <text:p>冥府発動</text:p>
          </table:table-cell>
          <table:table-cell table:style-name="ce11" table:formula="of:=IFERROR(VLOOKUP([.$X472];[$遺業能力番号.$A$1:$遺業能力番号.$B$9];2;0);0)" office:value-type="float" office:value="2" calcext:value-type="float">
            <text:p>2</text:p>
          </table:table-cell>
          <table:table-cell table:style-name="ce28" office:value-type="boolean" office:boolean-value="false" calcext:value-type="boolean">
            <text:p>FALSE</text:p>
          </table:table-cell>
          <table:table-cell office:value-type="string" calcext:value-type="string">
            <text:p>https://one-draw.jp/ijinden/cardlist/005/card/05_081.png</text:p>
          </table:table-cell>
          <table:table-cell table:style-name="ce11" table:formula="of:=CONCATENATE([$JSON.$A$1];[.$C472];[$JSON.$B$1];[.$E472];[$JSON.$C$1];[.F472];[$JSON.$D$1];[.$G472];[$JSON.$E$1];IF(ISNA([.$T472]);&quot;null&quot;;&quot;&quot;&quot;&quot;&amp;[.$T472]&amp;&quot;&quot;&quot;&quot;);[$JSON.$F$1];[.$V472];[$JSON.$G$1];IF(ISNA([.$X472]);&quot;null&quot;;&quot;&quot;&quot;&quot;&amp;[.$X472]&amp;&quot;&quot;&quot;&quot;);[$JSON.$H$1];[.$AA472];[$JSON.$I$1];[.$I472];[$JSON.$J$1];[.K472];[$JSON.$K$1];[.$M472];[$JSON.$L$1];[.$P472];[$JSON.$M$1];[.$O472];[$JSON.$N$1];[.$S472];[$JSON.$O$1];[.$U472];[$JSON.$P$1];IF(ISNA([.$W472]);&quot;null&quot;;[.$W472]);[$JSON.$Q$1];[.$Y472];[$JSON.$R$1];IF([.$Z472];&quot;true&quot;;&quot;false&quot;);[$JSON.$S$1];[.$A472];[$JSON.$T$1];[.$B472];[$JSON.$U$1])" office:value-type="string" office:string-value="{&quot;id&quot;:&quot;2nd1-81&quot;,&quot;name&quot;:&quot;ドローイング&quot;,&quot;displayName&quot;:&quot;ドローイング (第5弾)&quot;,&quot;kana&quot;:&quot;どろーいんぐ&quot;,&quot;traitText&quot;:null,&quot;ruleText&quot;:&quot;2ドローする。&quot;,&quot;legacyText&quot;:&quot;冥府発動&quot;,&quot;imageUrl&quot;:&quot;https://one-draw.jp/ijinden/cardlist/005/card/05_081.png&quot;,&quot;expansion&quot;:55,&quot;rarity&quot;:1,&quot;type&quot;:3,&quot;level&quot;:3,&quot;color&quot;:2,&quot;term&quot;:0,&quot;trait&quot;:0,&quot;power&quot;:null,&quot;legacy&quot;:2,&quot;anyNumCopies&quot;:false,&quot;orderTable&quot;:471,&quot;orderDeck&quot;:391}," calcext:value-type="string">
            <text:p>{"id":"2nd1-81","name":"ドローイング","displayName":"ドローイング (第5弾)","kana":"どろーいんぐ","traitText":null,"ruleText":"2ドローする。","legacyText":"冥府発動","imageUrl":"https://one-draw.jp/ijinden/cardlist/005/card/05_081.png","expansion":55,"rarity":1,"type":3,"level":3,"color":2,"term":0,"trait":0,"power":null,"legacy":2,"anyNumCopies":false,"orderTable":471,"orderDeck":391},</text:p>
          </table:table-cell>
          <table:table-cell table:number-columns-repeated="16356"/>
        </table:table-row>
        <table:table-row table:style-name="ro2">
          <table:table-cell table:style-name="ce11" office:value-type="float" office:value="472" calcext:value-type="float">
            <text:p>472</text:p>
          </table:table-cell>
          <table:table-cell table:style-name="ce11" office:value-type="float" office:value="424" calcext:value-type="float">
            <text:p>424</text:p>
          </table:table-cell>
          <table:table-cell table:formula="of:=CONCATENATE(&quot;2nd1-&quot;;TEXT([.D473];&quot;0&quot;))" office:value-type="string" office:string-value="2nd1-82" calcext:value-type="string">
            <text:p>2nd1-82</text:p>
          </table:table-cell>
          <table:table-cell office:value-type="float" office:value="82" calcext:value-type="float">
            <text:p>82</text:p>
          </table:table-cell>
          <table:table-cell office:value-type="string" calcext:value-type="string">
            <text:p>ペトリファイ</text:p>
          </table:table-cell>
          <table:table-cell table:style-name="ce11" table:formula="of:=[.E473]" office:value-type="string" office:string-value="ペトリファイ" calcext:value-type="string">
            <text:p>ペトリファイ</text:p>
          </table:table-cell>
          <table:table-cell office:value-type="string" calcext:value-type="string">
            <text:p>ぺとりふぁい</text:p>
          </table:table-cell>
          <table:table-cell table:style-name="ce11" office:value-type="string" calcext:value-type="string">
            <text:p>第５弾ブースターパック</text:p>
          </table:table-cell>
          <table:table-cell table:style-name="ce11" table:formula="of:=VLOOKUP([.H473];[$収録番号.$A$1:$収録番号.$B$10];2;0)" office:value-type="float" office:value="55" calcext:value-type="float">
            <text:p>55</text:p>
          </table:table-cell>
          <table:table-cell office:value-type="string" calcext:value-type="string">
            <text:p>N</text:p>
          </table:table-cell>
          <table:table-cell table:style-name="ce11" table:formula="of:=VLOOKUP([.J473];[$レアリティ番号.$A$1:$レアリティ番号.$B$4];2;0)" office:value-type="float" office:value="1" calcext:value-type="float">
            <text:p>1</text:p>
          </table:table-cell>
          <table:table-cell office:value-type="string" calcext:value-type="string">
            <text:p>マホウ</text:p>
          </table:table-cell>
          <table:table-cell table:style-name="ce11" table:formula="of:=VLOOKUP([.L473];[$種類番号.$A$1:$種類番号.$B$4];2;0)" office:value-type="float" office:value="3" calcext:value-type="float">
            <text:p>3</text:p>
          </table:table-cell>
          <table:table-cell office:value-type="string" calcext:value-type="string">
            <text:p>緑</text:p>
          </table:table-cell>
          <table:table-cell table:style-name="ce11" table:formula="of:=VLOOKUP([.N473];[$色番号.$A$1:$色番号.$B$10];2;0)"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47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73];[$特性番号.$A$1:$特性番号.$B$8];2;0);0)" office:value-type="float" office:value="0" calcext:value-type="float">
            <text:p>0</text:p>
          </table:table-cell>
          <table:table-cell office:value-type="string" calcext:value-type="string">
            <text:p>相手の戦場の寝ているイジンすべてを、裏にして魔力ゾーンに置く。</text:p>
          </table:table-cell>
          <table:table-cell table:style-name="ce25" table:formula="of:=NA()" office:value-type="string" office:string-value="" calcext:value-type="error">
            <text:p>#N/A</text:p>
          </table:table-cell>
          <table:table-cell office:value-type="string" calcext:value-type="string">
            <text:p>冥府発動</text:p>
          </table:table-cell>
          <table:table-cell table:style-name="ce11" table:formula="of:=IFERROR(VLOOKUP([.$X473];[$遺業能力番号.$A$1:$遺業能力番号.$B$9];2;0);0)" office:value-type="float" office:value="2" calcext:value-type="float">
            <text:p>2</text:p>
          </table:table-cell>
          <table:table-cell table:style-name="ce28" office:value-type="boolean" office:boolean-value="false" calcext:value-type="boolean">
            <text:p>FALSE</text:p>
          </table:table-cell>
          <table:table-cell office:value-type="string" calcext:value-type="string">
            <text:p>https://one-draw.jp/ijinden/cardlist/005/card/05_082.png</text:p>
          </table:table-cell>
          <table:table-cell table:style-name="ce11" table:formula="of:=CONCATENATE([$JSON.$A$1];[.$C473];[$JSON.$B$1];[.$E473];[$JSON.$C$1];[.F473];[$JSON.$D$1];[.$G473];[$JSON.$E$1];IF(ISNA([.$T473]);&quot;null&quot;;&quot;&quot;&quot;&quot;&amp;[.$T473]&amp;&quot;&quot;&quot;&quot;);[$JSON.$F$1];[.$V473];[$JSON.$G$1];IF(ISNA([.$X473]);&quot;null&quot;;&quot;&quot;&quot;&quot;&amp;[.$X473]&amp;&quot;&quot;&quot;&quot;);[$JSON.$H$1];[.$AA473];[$JSON.$I$1];[.$I473];[$JSON.$J$1];[.K473];[$JSON.$K$1];[.$M473];[$JSON.$L$1];[.$P473];[$JSON.$M$1];[.$O473];[$JSON.$N$1];[.$S473];[$JSON.$O$1];[.$U473];[$JSON.$P$1];IF(ISNA([.$W473]);&quot;null&quot;;[.$W473]);[$JSON.$Q$1];[.$Y473];[$JSON.$R$1];IF([.$Z473];&quot;true&quot;;&quot;false&quot;);[$JSON.$S$1];[.$A473];[$JSON.$T$1];[.$B473];[$JSON.$U$1])" office:value-type="string" office:string-value="{&quot;id&quot;:&quot;2nd1-82&quot;,&quot;name&quot;:&quot;ペトリファイ&quot;,&quot;displayName&quot;:&quot;ペトリファイ&quot;,&quot;kana&quot;:&quot;ぺとりふぁい&quot;,&quot;traitText&quot;:null,&quot;ruleText&quot;:&quot;相手の戦場の寝ているイジンすべてを、裏にして魔力ゾーンに置く。&quot;,&quot;legacyText&quot;:&quot;冥府発動&quot;,&quot;imageUrl&quot;:&quot;https://one-draw.jp/ijinden/cardlist/005/card/05_082.png&quot;,&quot;expansion&quot;:55,&quot;rarity&quot;:1,&quot;type&quot;:3,&quot;level&quot;:6,&quot;color&quot;:4,&quot;term&quot;:0,&quot;trait&quot;:0,&quot;power&quot;:null,&quot;legacy&quot;:2,&quot;anyNumCopies&quot;:false,&quot;orderTable&quot;:472,&quot;orderDeck&quot;:424}," calcext:value-type="string">
            <text:p>{"id":"2nd1-82","name":"ペトリファイ","displayName":"ペトリファイ","kana":"ぺとりふぁい","traitText":null,"ruleText":"相手の戦場の寝ているイジンすべてを、裏にして魔力ゾーンに置く。","legacyText":"冥府発動","imageUrl":"https://one-draw.jp/ijinden/cardlist/005/card/05_082.png","expansion":55,"rarity":1,"type":3,"level":6,"color":4,"term":0,"trait":0,"power":null,"legacy":2,"anyNumCopies":false,"orderTable":472,"orderDeck":424},</text:p>
          </table:table-cell>
          <table:table-cell table:number-columns-repeated="16356"/>
        </table:table-row>
        <table:table-row table:style-name="ro2">
          <table:table-cell table:style-name="ce11" office:value-type="float" office:value="473" calcext:value-type="float">
            <text:p>473</text:p>
          </table:table-cell>
          <table:table-cell table:style-name="ce11" office:value-type="float" office:value="362" calcext:value-type="float">
            <text:p>362</text:p>
          </table:table-cell>
          <table:table-cell table:formula="of:=CONCATENATE(&quot;2nd1-&quot;;TEXT([.D474];&quot;0&quot;))" office:value-type="string" office:string-value="2nd1-83" calcext:value-type="string">
            <text:p>2nd1-83</text:p>
          </table:table-cell>
          <table:table-cell office:value-type="float" office:value="83" calcext:value-type="float">
            <text:p>83</text:p>
          </table:table-cell>
          <table:table-cell office:value-type="string" calcext:value-type="string">
            <text:p>マナ</text:p>
          </table:table-cell>
          <table:table-cell table:style-name="ce11" table:formula="of:=[.E474]" office:value-type="string" office:string-value="マナ" calcext:value-type="string">
            <text:p>マナ</text:p>
          </table:table-cell>
          <table:table-cell office:value-type="string" calcext:value-type="string">
            <text:p>まな</text:p>
          </table:table-cell>
          <table:table-cell table:style-name="ce11" office:value-type="string" calcext:value-type="string">
            <text:p>第５弾ブースターパック</text:p>
          </table:table-cell>
          <table:table-cell table:style-name="ce11" table:formula="of:=VLOOKUP([.H474];[$収録番号.$A$1:$収録番号.$B$10];2;0)" office:value-type="float" office:value="55" calcext:value-type="float">
            <text:p>55</text:p>
          </table:table-cell>
          <table:table-cell office:value-type="string" calcext:value-type="string">
            <text:p>R</text:p>
          </table:table-cell>
          <table:table-cell table:style-name="ce11" table:formula="of:=VLOOKUP([.J474];[$レアリティ番号.$A$1:$レアリティ番号.$B$4];2;0)" office:value-type="float" office:value="2" calcext:value-type="float">
            <text:p>2</text:p>
          </table:table-cell>
          <table:table-cell office:value-type="string" calcext:value-type="string">
            <text:p>マホウ</text:p>
          </table:table-cell>
          <table:table-cell table:style-name="ce11" table:formula="of:=VLOOKUP([.L474];[$種類番号.$A$1:$種類番号.$B$4];2;0)" office:value-type="float" office:value="3" calcext:value-type="float">
            <text:p>3</text:p>
          </table:table-cell>
          <table:table-cell office:value-type="string" calcext:value-type="string">
            <text:p>緑</text:p>
          </table:table-cell>
          <table:table-cell table:style-name="ce11" table:formula="of:=VLOOKUP([.N474];[$色番号.$A$1:$色番号.$B$10];2;0)" office:value-type="float" office:value="4" calcext:value-type="float">
            <text:p>4</text:p>
          </table:table-cell>
          <table:table-cell table:number-columns-repeated="2"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47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74];[$特性番号.$A$1:$特性番号.$B$8];2;0);0)" office:value-type="float" office:value="0" calcext:value-type="float">
            <text:p>0</text:p>
          </table:table-cell>
          <table:table-cell office:value-type="string" calcext:value-type="string">
            <text:p>この能力は、自分の手札の他のカード1つ以上を指定して発動できる。そのカードすべてを裏にして魔力ゾーンに置く。</text:p>
          </table:table-cell>
          <table:table-cell table:style-name="ce25" table:formula="of:=NA()" office:value-type="string" office:string-value="" calcext:value-type="error">
            <text:p>#N/A</text:p>
          </table:table-cell>
          <table:table-cell office:value-type="string" calcext:value-type="string">
            <text:p>冥府発動</text:p>
          </table:table-cell>
          <table:table-cell table:style-name="ce11" table:formula="of:=IFERROR(VLOOKUP([.$X474];[$遺業能力番号.$A$1:$遺業能力番号.$B$9];2;0);0)" office:value-type="float" office:value="2" calcext:value-type="float">
            <text:p>2</text:p>
          </table:table-cell>
          <table:table-cell table:style-name="ce28" office:value-type="boolean" office:boolean-value="false" calcext:value-type="boolean">
            <text:p>FALSE</text:p>
          </table:table-cell>
          <table:table-cell office:value-type="string" calcext:value-type="string">
            <text:p>https://one-draw.jp/ijinden/cardlist/005/card/05_083.png</text:p>
          </table:table-cell>
          <table:table-cell table:style-name="ce11" table:formula="of:=CONCATENATE([$JSON.$A$1];[.$C474];[$JSON.$B$1];[.$E474];[$JSON.$C$1];[.F474];[$JSON.$D$1];[.$G474];[$JSON.$E$1];IF(ISNA([.$T474]);&quot;null&quot;;&quot;&quot;&quot;&quot;&amp;[.$T474]&amp;&quot;&quot;&quot;&quot;);[$JSON.$F$1];[.$V474];[$JSON.$G$1];IF(ISNA([.$X474]);&quot;null&quot;;&quot;&quot;&quot;&quot;&amp;[.$X474]&amp;&quot;&quot;&quot;&quot;);[$JSON.$H$1];[.$AA474];[$JSON.$I$1];[.$I474];[$JSON.$J$1];[.K474];[$JSON.$K$1];[.$M474];[$JSON.$L$1];[.$P474];[$JSON.$M$1];[.$O474];[$JSON.$N$1];[.$S474];[$JSON.$O$1];[.$U474];[$JSON.$P$1];IF(ISNA([.$W474]);&quot;null&quot;;[.$W474]);[$JSON.$Q$1];[.$Y474];[$JSON.$R$1];IF([.$Z474];&quot;true&quot;;&quot;false&quot;);[$JSON.$S$1];[.$A474];[$JSON.$T$1];[.$B474];[$JSON.$U$1])" office:value-type="string" office:string-value="{&quot;id&quot;:&quot;2nd1-83&quot;,&quot;name&quot;:&quot;マナ&quot;,&quot;displayName&quot;:&quot;マナ&quot;,&quot;kana&quot;:&quot;まな&quot;,&quot;traitText&quot;:null,&quot;ruleText&quot;:&quot;この能力は、自分の手札の他のカード1つ以上を指定して発動できる。そのカードすべてを裏にして魔力ゾーンに置く。&quot;,&quot;legacyText&quot;:&quot;冥府発動&quot;,&quot;imageUrl&quot;:&quot;https://one-draw.jp/ijinden/cardlist/005/card/05_083.png&quot;,&quot;expansion&quot;:55,&quot;rarity&quot;:2,&quot;type&quot;:3,&quot;level&quot;:1,&quot;color&quot;:4,&quot;term&quot;:0,&quot;trait&quot;:0,&quot;power&quot;:null,&quot;legacy&quot;:2,&quot;anyNumCopies&quot;:false,&quot;orderTable&quot;:473,&quot;orderDeck&quot;:362}," calcext:value-type="string">
            <text:p>{"id":"2nd1-83","name":"マナ","displayName":"マナ","kana":"まな","traitText":null,"ruleText":"この能力は、自分の手札の他のカード1つ以上を指定して発動できる。そのカードすべてを裏にして魔力ゾーンに置く。","legacyText":"冥府発動","imageUrl":"https://one-draw.jp/ijinden/cardlist/005/card/05_083.png","expansion":55,"rarity":2,"type":3,"level":1,"color":4,"term":0,"trait":0,"power":null,"legacy":2,"anyNumCopies":false,"orderTable":473,"orderDeck":362},</text:p>
          </table:table-cell>
          <table:table-cell table:number-columns-repeated="16356"/>
        </table:table-row>
        <table:table-row table:style-name="ro2">
          <table:table-cell table:style-name="ce11" office:value-type="float" office:value="474" calcext:value-type="float">
            <text:p>474</text:p>
          </table:table-cell>
          <table:table-cell table:style-name="ce11" office:value-type="float" office:value="406" calcext:value-type="float">
            <text:p>406</text:p>
          </table:table-cell>
          <table:table-cell table:formula="of:=CONCATENATE(&quot;2nd1-&quot;;TEXT([.D475];&quot;0&quot;))" office:value-type="string" office:string-value="2nd1-84" calcext:value-type="string">
            <text:p>2nd1-84</text:p>
          </table:table-cell>
          <table:table-cell office:value-type="float" office:value="84" calcext:value-type="float">
            <text:p>84</text:p>
          </table:table-cell>
          <table:table-cell office:value-type="string" calcext:value-type="string">
            <text:p>ギャザリング</text:p>
          </table:table-cell>
          <table:table-cell office:value-type="string" calcext:value-type="string">
            <text:p>ギャザリング (第5弾)</text:p>
          </table:table-cell>
          <table:table-cell office:value-type="string" calcext:value-type="string">
            <text:p>ぎゃざりんぐ</text:p>
          </table:table-cell>
          <table:table-cell table:style-name="ce11" office:value-type="string" calcext:value-type="string">
            <text:p>第５弾ブースターパック</text:p>
          </table:table-cell>
          <table:table-cell table:style-name="ce11" table:formula="of:=VLOOKUP([.H475];[$収録番号.$A$1:$収録番号.$B$10];2;0)" office:value-type="float" office:value="55" calcext:value-type="float">
            <text:p>55</text:p>
          </table:table-cell>
          <table:table-cell office:value-type="string" calcext:value-type="string">
            <text:p>N</text:p>
          </table:table-cell>
          <table:table-cell table:style-name="ce11" table:formula="of:=VLOOKUP([.J475];[$レアリティ番号.$A$1:$レアリティ番号.$B$4];2;0)" office:value-type="float" office:value="1" calcext:value-type="float">
            <text:p>1</text:p>
          </table:table-cell>
          <table:table-cell office:value-type="string" calcext:value-type="string">
            <text:p>マホウ</text:p>
          </table:table-cell>
          <table:table-cell table:style-name="ce11" table:formula="of:=VLOOKUP([.L475];[$種類番号.$A$1:$種類番号.$B$4];2;0)" office:value-type="float" office:value="3" calcext:value-type="float">
            <text:p>3</text:p>
          </table:table-cell>
          <table:table-cell office:value-type="string" calcext:value-type="string">
            <text:p>緑</text:p>
          </table:table-cell>
          <table:table-cell table:style-name="ce11" table:formula="of:=VLOOKUP([.N475];[$色番号.$A$1:$色番号.$B$10];2;0)"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47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75];[$特性番号.$A$1:$特性番号.$B$8];2;0);0)" office:value-type="float" office:value="0" calcext:value-type="float">
            <text:p>0</text:p>
          </table:table-cell>
          <table:table-cell office:value-type="string" calcext:value-type="string">
            <text:p>自分の戦場のガーディアンすべてを手札に戻す。自分の山札の上からカード1つを裏のまま戦場に置く。</text:p>
          </table:table-cell>
          <table:table-cell table:style-name="ce25" table:formula="of:=NA()" office:value-type="string" office:string-value="" calcext:value-type="error">
            <text:p>#N/A</text:p>
          </table:table-cell>
          <table:table-cell office:value-type="string" calcext:value-type="string">
            <text:p>魔力化</text:p>
          </table:table-cell>
          <table:table-cell table:style-name="ce11" table:formula="of:=IFERROR(VLOOKUP([.$X475];[$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84.png</text:p>
          </table:table-cell>
          <table:table-cell table:style-name="ce11" table:formula="of:=CONCATENATE([$JSON.$A$1];[.$C475];[$JSON.$B$1];[.$E475];[$JSON.$C$1];[.F475];[$JSON.$D$1];[.$G475];[$JSON.$E$1];IF(ISNA([.$T475]);&quot;null&quot;;&quot;&quot;&quot;&quot;&amp;[.$T475]&amp;&quot;&quot;&quot;&quot;);[$JSON.$F$1];[.$V475];[$JSON.$G$1];IF(ISNA([.$X475]);&quot;null&quot;;&quot;&quot;&quot;&quot;&amp;[.$X475]&amp;&quot;&quot;&quot;&quot;);[$JSON.$H$1];[.$AA475];[$JSON.$I$1];[.$I475];[$JSON.$J$1];[.K475];[$JSON.$K$1];[.$M475];[$JSON.$L$1];[.$P475];[$JSON.$M$1];[.$O475];[$JSON.$N$1];[.$S475];[$JSON.$O$1];[.$U475];[$JSON.$P$1];IF(ISNA([.$W475]);&quot;null&quot;;[.$W475]);[$JSON.$Q$1];[.$Y475];[$JSON.$R$1];IF([.$Z475];&quot;true&quot;;&quot;false&quot;);[$JSON.$S$1];[.$A475];[$JSON.$T$1];[.$B475];[$JSON.$U$1])" office:value-type="string" office:string-value="{&quot;id&quot;:&quot;2nd1-84&quot;,&quot;name&quot;:&quot;ギャザリング&quot;,&quot;displayName&quot;:&quot;ギャザリング (第5弾)&quot;,&quot;kana&quot;:&quot;ぎゃざりんぐ&quot;,&quot;traitText&quot;:null,&quot;ruleText&quot;:&quot;自分の戦場のガーディアンすべてを手札に戻す。自分の山札の上からカード1つを裏のまま戦場に置く。&quot;,&quot;legacyText&quot;:&quot;魔力化&quot;,&quot;imageUrl&quot;:&quot;https://one-draw.jp/ijinden/cardlist/005/card/05_084.png&quot;,&quot;expansion&quot;:55,&quot;rarity&quot;:1,&quot;type&quot;:3,&quot;level&quot;:4,&quot;color&quot;:4,&quot;term&quot;:0,&quot;trait&quot;:0,&quot;power&quot;:null,&quot;legacy&quot;:1,&quot;anyNumCopies&quot;:false,&quot;orderTable&quot;:474,&quot;orderDeck&quot;:406}," calcext:value-type="string">
            <text:p>{"id":"2nd1-84","name":"ギャザリング","displayName":"ギャザリング (第5弾)","kana":"ぎゃざりんぐ","traitText":null,"ruleText":"自分の戦場のガーディアンすべてを手札に戻す。自分の山札の上からカード1つを裏のまま戦場に置く。","legacyText":"魔力化","imageUrl":"https://one-draw.jp/ijinden/cardlist/005/card/05_084.png","expansion":55,"rarity":1,"type":3,"level":4,"color":4,"term":0,"trait":0,"power":null,"legacy":1,"anyNumCopies":false,"orderTable":474,"orderDeck":406},</text:p>
          </table:table-cell>
          <table:table-cell table:number-columns-repeated="16356"/>
        </table:table-row>
        <table:table-row table:style-name="ro2">
          <table:table-cell table:style-name="ce11" office:value-type="float" office:value="475" calcext:value-type="float">
            <text:p>475</text:p>
          </table:table-cell>
          <table:table-cell table:style-name="ce11" office:value-type="float" office:value="400" calcext:value-type="float">
            <text:p>400</text:p>
          </table:table-cell>
          <table:table-cell table:formula="of:=CONCATENATE(&quot;2nd1-&quot;;TEXT([.D476];&quot;0&quot;))" office:value-type="string" office:string-value="2nd1-85" calcext:value-type="string">
            <text:p>2nd1-85</text:p>
          </table:table-cell>
          <table:table-cell office:value-type="float" office:value="85" calcext:value-type="float">
            <text:p>85</text:p>
          </table:table-cell>
          <table:table-cell office:value-type="string" calcext:value-type="string">
            <text:p>デストルドー</text:p>
          </table:table-cell>
          <table:table-cell table:style-name="ce11" table:formula="of:=[.E476]" office:value-type="string" office:string-value="デストルドー" calcext:value-type="string">
            <text:p>デストルドー</text:p>
          </table:table-cell>
          <table:table-cell office:value-type="string" calcext:value-type="string">
            <text:p>ですとるどー</text:p>
          </table:table-cell>
          <table:table-cell table:style-name="ce11" office:value-type="string" calcext:value-type="string">
            <text:p>第５弾ブースターパック</text:p>
          </table:table-cell>
          <table:table-cell table:style-name="ce11" table:formula="of:=VLOOKUP([.H476];[$収録番号.$A$1:$収録番号.$B$10];2;0)" office:value-type="float" office:value="55" calcext:value-type="float">
            <text:p>55</text:p>
          </table:table-cell>
          <table:table-cell office:value-type="string" calcext:value-type="string">
            <text:p>N</text:p>
          </table:table-cell>
          <table:table-cell table:style-name="ce11" table:formula="of:=VLOOKUP([.J476];[$レアリティ番号.$A$1:$レアリティ番号.$B$4];2;0)" office:value-type="float" office:value="1" calcext:value-type="float">
            <text:p>1</text:p>
          </table:table-cell>
          <table:table-cell office:value-type="string" calcext:value-type="string">
            <text:p>マホウ</text:p>
          </table:table-cell>
          <table:table-cell table:style-name="ce11" table:formula="of:=VLOOKUP([.L476];[$種類番号.$A$1:$種類番号.$B$4];2;0)" office:value-type="float" office:value="3" calcext:value-type="float">
            <text:p>3</text:p>
          </table:table-cell>
          <table:table-cell office:value-type="string" calcext:value-type="string">
            <text:p>黄</text:p>
          </table:table-cell>
          <table:table-cell table:style-name="ce11" table:formula="of:=VLOOKUP([.N476];[$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47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76];[$特性番号.$A$1:$特性番号.$B$8];2;0);0)" office:value-type="float" office:value="0" calcext:value-type="float">
            <text:p>0</text:p>
          </table:table-cell>
          <table:table-cell office:value-type="string" calcext:value-type="string">
            <text:p>相手の戦場の遺業能力を持たないイジンすべてを、好きな順番で山札の下に戻す。</text:p>
          </table:table-cell>
          <table:table-cell table:style-name="ce25" table:formula="of:=NA()" office:value-type="string" office:string-value="" calcext:value-type="error">
            <text:p>#N/A</text:p>
          </table:table-cell>
          <table:table-cell office:value-type="string" calcext:value-type="string">
            <text:p>冥府発動</text:p>
          </table:table-cell>
          <table:table-cell table:style-name="ce11" table:formula="of:=IFERROR(VLOOKUP([.$X476];[$遺業能力番号.$A$1:$遺業能力番号.$B$9];2;0);0)" office:value-type="float" office:value="2" calcext:value-type="float">
            <text:p>2</text:p>
          </table:table-cell>
          <table:table-cell table:style-name="ce28" office:value-type="boolean" office:boolean-value="false" calcext:value-type="boolean">
            <text:p>FALSE</text:p>
          </table:table-cell>
          <table:table-cell office:value-type="string" calcext:value-type="string">
            <text:p>https://one-draw.jp/ijinden/cardlist/005/card/05_085.png</text:p>
          </table:table-cell>
          <table:table-cell table:style-name="ce11" table:formula="of:=CONCATENATE([$JSON.$A$1];[.$C476];[$JSON.$B$1];[.$E476];[$JSON.$C$1];[.F476];[$JSON.$D$1];[.$G476];[$JSON.$E$1];IF(ISNA([.$T476]);&quot;null&quot;;&quot;&quot;&quot;&quot;&amp;[.$T476]&amp;&quot;&quot;&quot;&quot;);[$JSON.$F$1];[.$V476];[$JSON.$G$1];IF(ISNA([.$X476]);&quot;null&quot;;&quot;&quot;&quot;&quot;&amp;[.$X476]&amp;&quot;&quot;&quot;&quot;);[$JSON.$H$1];[.$AA476];[$JSON.$I$1];[.$I476];[$JSON.$J$1];[.K476];[$JSON.$K$1];[.$M476];[$JSON.$L$1];[.$P476];[$JSON.$M$1];[.$O476];[$JSON.$N$1];[.$S476];[$JSON.$O$1];[.$U476];[$JSON.$P$1];IF(ISNA([.$W476]);&quot;null&quot;;[.$W476]);[$JSON.$Q$1];[.$Y476];[$JSON.$R$1];IF([.$Z476];&quot;true&quot;;&quot;false&quot;);[$JSON.$S$1];[.$A476];[$JSON.$T$1];[.$B476];[$JSON.$U$1])" office:value-type="string" office:string-value="{&quot;id&quot;:&quot;2nd1-85&quot;,&quot;name&quot;:&quot;デストルドー&quot;,&quot;displayName&quot;:&quot;デストルドー&quot;,&quot;kana&quot;:&quot;ですとるどー&quot;,&quot;traitText&quot;:null,&quot;ruleText&quot;:&quot;相手の戦場の遺業能力を持たないイジンすべてを、好きな順番で山札の下に戻す。&quot;,&quot;legacyText&quot;:&quot;冥府発動&quot;,&quot;imageUrl&quot;:&quot;https://one-draw.jp/ijinden/cardlist/005/card/05_085.png&quot;,&quot;expansion&quot;:55,&quot;rarity&quot;:1,&quot;type&quot;:3,&quot;level&quot;:3,&quot;color&quot;:8,&quot;term&quot;:0,&quot;trait&quot;:0,&quot;power&quot;:null,&quot;legacy&quot;:2,&quot;anyNumCopies&quot;:false,&quot;orderTable&quot;:475,&quot;orderDeck&quot;:400}," calcext:value-type="string">
            <text:p>{"id":"2nd1-85","name":"デストルドー","displayName":"デストルドー","kana":"ですとるどー","traitText":null,"ruleText":"相手の戦場の遺業能力を持たないイジンすべてを、好きな順番で山札の下に戻す。","legacyText":"冥府発動","imageUrl":"https://one-draw.jp/ijinden/cardlist/005/card/05_085.png","expansion":55,"rarity":1,"type":3,"level":3,"color":8,"term":0,"trait":0,"power":null,"legacy":2,"anyNumCopies":false,"orderTable":475,"orderDeck":400},</text:p>
          </table:table-cell>
          <table:table-cell table:number-columns-repeated="16356"/>
        </table:table-row>
        <table:table-row table:style-name="ro2">
          <table:table-cell table:style-name="ce11" office:value-type="float" office:value="476" calcext:value-type="float">
            <text:p>476</text:p>
          </table:table-cell>
          <table:table-cell table:style-name="ce11" office:value-type="float" office:value="418" calcext:value-type="float">
            <text:p>418</text:p>
          </table:table-cell>
          <table:table-cell table:formula="of:=CONCATENATE(&quot;2nd1-&quot;;TEXT([.D477];&quot;0&quot;))" office:value-type="string" office:string-value="2nd1-86" calcext:value-type="string">
            <text:p>2nd1-86</text:p>
          </table:table-cell>
          <table:table-cell office:value-type="float" office:value="86" calcext:value-type="float">
            <text:p>86</text:p>
          </table:table-cell>
          <table:table-cell office:value-type="string" calcext:value-type="string">
            <text:p>ドシャカジ</text:p>
          </table:table-cell>
          <table:table-cell table:style-name="ce11" table:formula="of:=[.E477]" office:value-type="string" office:string-value="ドシャカジ" calcext:value-type="string">
            <text:p>ドシャカジ</text:p>
          </table:table-cell>
          <table:table-cell office:value-type="string" calcext:value-type="string">
            <text:p>どしゃかじ</text:p>
          </table:table-cell>
          <table:table-cell table:style-name="ce11" office:value-type="string" calcext:value-type="string">
            <text:p>第５弾ブースターパック</text:p>
          </table:table-cell>
          <table:table-cell table:style-name="ce11" table:formula="of:=VLOOKUP([.H477];[$収録番号.$A$1:$収録番号.$B$10];2;0)" office:value-type="float" office:value="55" calcext:value-type="float">
            <text:p>55</text:p>
          </table:table-cell>
          <table:table-cell office:value-type="string" calcext:value-type="string">
            <text:p>R</text:p>
          </table:table-cell>
          <table:table-cell table:style-name="ce11" table:formula="of:=VLOOKUP([.J477];[$レアリティ番号.$A$1:$レアリティ番号.$B$4];2;0)" office:value-type="float" office:value="2" calcext:value-type="float">
            <text:p>2</text:p>
          </table:table-cell>
          <table:table-cell office:value-type="string" calcext:value-type="string">
            <text:p>マホウ</text:p>
          </table:table-cell>
          <table:table-cell table:style-name="ce11" table:formula="of:=VLOOKUP([.L477];[$種類番号.$A$1:$種類番号.$B$4];2;0)" office:value-type="float" office:value="3" calcext:value-type="float">
            <text:p>3</text:p>
          </table:table-cell>
          <table:table-cell office:value-type="string" calcext:value-type="string">
            <text:p>黄</text:p>
          </table:table-cell>
          <table:table-cell table:style-name="ce11" table:formula="of:=VLOOKUP([.N477];[$色番号.$A$1:$色番号.$B$10];2;0)"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47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77];[$特性番号.$A$1:$特性番号.$B$8];2;0);0)" office:value-type="float" office:value="0" calcext:value-type="float">
            <text:p>0</text:p>
          </table:table-cell>
          <table:table-cell office:value-type="string" calcext:value-type="string">
            <text:p>自分の山札の上からカード5つを墓地に置く。自分の墓地の、自分の魔力レベル以下のレベルのイジンかハイケイ1つを戦場に置く。</text:p>
          </table:table-cell>
          <table:table-cell table:style-name="ce25" table:formula="of:=NA()" office:value-type="string" office:string-value="" calcext:value-type="error">
            <text:p>#N/A</text:p>
          </table:table-cell>
          <table:table-cell office:value-type="string" calcext:value-type="string">
            <text:p>手札に戻す</text:p>
          </table:table-cell>
          <table:table-cell table:style-name="ce11" table:formula="of:=IFERROR(VLOOKUP([.$X477];[$遺業能力番号.$A$1:$遺業能力番号.$B$9];2;0);0)" office:value-type="float" office:value="5" calcext:value-type="float">
            <text:p>5</text:p>
          </table:table-cell>
          <table:table-cell table:style-name="ce28" office:value-type="boolean" office:boolean-value="false" calcext:value-type="boolean">
            <text:p>FALSE</text:p>
          </table:table-cell>
          <table:table-cell office:value-type="string" calcext:value-type="string">
            <text:p>https://one-draw.jp/ijinden/cardlist/005/card/05_086.png</text:p>
          </table:table-cell>
          <table:table-cell table:style-name="ce11" table:formula="of:=CONCATENATE([$JSON.$A$1];[.$C477];[$JSON.$B$1];[.$E477];[$JSON.$C$1];[.F477];[$JSON.$D$1];[.$G477];[$JSON.$E$1];IF(ISNA([.$T477]);&quot;null&quot;;&quot;&quot;&quot;&quot;&amp;[.$T477]&amp;&quot;&quot;&quot;&quot;);[$JSON.$F$1];[.$V477];[$JSON.$G$1];IF(ISNA([.$X477]);&quot;null&quot;;&quot;&quot;&quot;&quot;&amp;[.$X477]&amp;&quot;&quot;&quot;&quot;);[$JSON.$H$1];[.$AA477];[$JSON.$I$1];[.$I477];[$JSON.$J$1];[.K477];[$JSON.$K$1];[.$M477];[$JSON.$L$1];[.$P477];[$JSON.$M$1];[.$O477];[$JSON.$N$1];[.$S477];[$JSON.$O$1];[.$U477];[$JSON.$P$1];IF(ISNA([.$W477]);&quot;null&quot;;[.$W477]);[$JSON.$Q$1];[.$Y477];[$JSON.$R$1];IF([.$Z477];&quot;true&quot;;&quot;false&quot;);[$JSON.$S$1];[.$A477];[$JSON.$T$1];[.$B477];[$JSON.$U$1])" office:value-type="string" office:string-value="{&quot;id&quot;:&quot;2nd1-86&quot;,&quot;name&quot;:&quot;ドシャカジ&quot;,&quot;displayName&quot;:&quot;ドシャカジ&quot;,&quot;kana&quot;:&quot;どしゃかじ&quot;,&quot;traitText&quot;:null,&quot;ruleText&quot;:&quot;自分の山札の上からカード5つを墓地に置く。自分の墓地の、自分の魔力レベル以下のレベルのイジンかハイケイ1つを戦場に置く。&quot;,&quot;legacyText&quot;:&quot;手札に戻す&quot;,&quot;imageUrl&quot;:&quot;https://one-draw.jp/ijinden/cardlist/005/card/05_086.png&quot;,&quot;expansion&quot;:55,&quot;rarity&quot;:2,&quot;type&quot;:3,&quot;level&quot;:5,&quot;color&quot;:8,&quot;term&quot;:0,&quot;trait&quot;:0,&quot;power&quot;:null,&quot;legacy&quot;:5,&quot;anyNumCopies&quot;:false,&quot;orderTable&quot;:476,&quot;orderDeck&quot;:418}," calcext:value-type="string">
            <text:p>{"id":"2nd1-86","name":"ドシャカジ","displayName":"ドシャカジ","kana":"どしゃかじ","traitText":null,"ruleText":"自分の山札の上からカード5つを墓地に置く。自分の墓地の、自分の魔力レベル以下のレベルのイジンかハイケイ1つを戦場に置く。","legacyText":"手札に戻す","imageUrl":"https://one-draw.jp/ijinden/cardlist/005/card/05_086.png","expansion":55,"rarity":2,"type":3,"level":5,"color":8,"term":0,"trait":0,"power":null,"legacy":5,"anyNumCopies":false,"orderTable":476,"orderDeck":418},</text:p>
          </table:table-cell>
          <table:table-cell table:number-columns-repeated="16356"/>
        </table:table-row>
        <table:table-row table:style-name="ro2">
          <table:table-cell table:style-name="ce11" office:value-type="float" office:value="477" calcext:value-type="float">
            <text:p>477</text:p>
          </table:table-cell>
          <table:table-cell table:style-name="ce11" office:value-type="float" office:value="363" calcext:value-type="float">
            <text:p>363</text:p>
          </table:table-cell>
          <table:table-cell table:formula="of:=CONCATENATE(&quot;2nd1-&quot;;TEXT([.D478];&quot;0&quot;))" office:value-type="string" office:string-value="2nd1-87" calcext:value-type="string">
            <text:p>2nd1-87</text:p>
          </table:table-cell>
          <table:table-cell office:value-type="float" office:value="87" calcext:value-type="float">
            <text:p>87</text:p>
          </table:table-cell>
          <table:table-cell office:value-type="string" calcext:value-type="string">
            <text:p>レクイエム</text:p>
          </table:table-cell>
          <table:table-cell office:value-type="string" calcext:value-type="string">
            <text:p>レクイエム (第5弾)</text:p>
          </table:table-cell>
          <table:table-cell office:value-type="string" calcext:value-type="string">
            <text:p>れくいえむ</text:p>
          </table:table-cell>
          <table:table-cell table:style-name="ce11" office:value-type="string" calcext:value-type="string">
            <text:p>第５弾ブースターパック</text:p>
          </table:table-cell>
          <table:table-cell table:style-name="ce11" table:formula="of:=VLOOKUP([.H478];[$収録番号.$A$1:$収録番号.$B$10];2;0)" office:value-type="float" office:value="55" calcext:value-type="float">
            <text:p>55</text:p>
          </table:table-cell>
          <table:table-cell office:value-type="string" calcext:value-type="string">
            <text:p>N</text:p>
          </table:table-cell>
          <table:table-cell table:style-name="ce11" table:formula="of:=VLOOKUP([.J478];[$レアリティ番号.$A$1:$レアリティ番号.$B$4];2;0)" office:value-type="float" office:value="1" calcext:value-type="float">
            <text:p>1</text:p>
          </table:table-cell>
          <table:table-cell office:value-type="string" calcext:value-type="string">
            <text:p>マホウ</text:p>
          </table:table-cell>
          <table:table-cell table:style-name="ce11" table:formula="of:=VLOOKUP([.L478];[$種類番号.$A$1:$種類番号.$B$4];2;0)" office:value-type="float" office:value="3" calcext:value-type="float">
            <text:p>3</text:p>
          </table:table-cell>
          <table:table-cell office:value-type="string" calcext:value-type="string">
            <text:p>黄</text:p>
          </table:table-cell>
          <table:table-cell table:style-name="ce11" table:formula="of:=VLOOKUP([.N478];[$色番号.$A$1:$色番号.$B$10];2;0)"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style-name="ce11" table:formula="of:=NA()" office:value-type="string" office:string-value="" calcext:value-type="error">
            <text:p>#N/A</text:p>
          </table:table-cell>
          <table:table-cell table:style-name="ce11" table:formula="of:=IFERROR(VLOOKUP([.$R47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78];[$特性番号.$A$1:$特性番号.$B$8];2;0);0)" office:value-type="float" office:value="0" calcext:value-type="float">
            <text:p>0</text:p>
          </table:table-cell>
          <table:table-cell office:value-type="string" calcext:value-type="string">
            <text:p>この能力は、自分の墓地か相手の墓地のどちらかから、マリョクでないカード3つ以上を指定して発動できる。そのカードすべてを好きな順番で山札の下に戻して、1ドローする。</text:p>
          </table:table-cell>
          <table:table-cell table:style-name="ce25" table:formula="of:=NA()" office:value-type="string" office:string-value="" calcext:value-type="error">
            <text:p>#N/A</text:p>
          </table:table-cell>
          <table:table-cell office:value-type="string" calcext:value-type="string">
            <text:p>手札に戻す</text:p>
          </table:table-cell>
          <table:table-cell table:style-name="ce11" table:formula="of:=IFERROR(VLOOKUP([.$X478];[$遺業能力番号.$A$1:$遺業能力番号.$B$9];2;0);0)" office:value-type="float" office:value="5" calcext:value-type="float">
            <text:p>5</text:p>
          </table:table-cell>
          <table:table-cell table:style-name="ce28" office:value-type="boolean" office:boolean-value="false" calcext:value-type="boolean">
            <text:p>FALSE</text:p>
          </table:table-cell>
          <table:table-cell office:value-type="string" calcext:value-type="string">
            <text:p>https://one-draw.jp/ijinden/cardlist/005/card/05_087.png</text:p>
          </table:table-cell>
          <table:table-cell table:style-name="ce11" table:formula="of:=CONCATENATE([$JSON.$A$1];[.$C478];[$JSON.$B$1];[.$E478];[$JSON.$C$1];[.F478];[$JSON.$D$1];[.$G478];[$JSON.$E$1];IF(ISNA([.$T478]);&quot;null&quot;;&quot;&quot;&quot;&quot;&amp;[.$T478]&amp;&quot;&quot;&quot;&quot;);[$JSON.$F$1];[.$V478];[$JSON.$G$1];IF(ISNA([.$X478]);&quot;null&quot;;&quot;&quot;&quot;&quot;&amp;[.$X478]&amp;&quot;&quot;&quot;&quot;);[$JSON.$H$1];[.$AA478];[$JSON.$I$1];[.$I478];[$JSON.$J$1];[.K478];[$JSON.$K$1];[.$M478];[$JSON.$L$1];[.$P478];[$JSON.$M$1];[.$O478];[$JSON.$N$1];[.$S478];[$JSON.$O$1];[.$U478];[$JSON.$P$1];IF(ISNA([.$W478]);&quot;null&quot;;[.$W478]);[$JSON.$Q$1];[.$Y478];[$JSON.$R$1];IF([.$Z478];&quot;true&quot;;&quot;false&quot;);[$JSON.$S$1];[.$A478];[$JSON.$T$1];[.$B478];[$JSON.$U$1])" office:value-type="string" office:string-value="{&quot;id&quot;:&quot;2nd1-87&quot;,&quot;name&quot;:&quot;レクイエム&quot;,&quot;displayName&quot;:&quot;レクイエム (第5弾)&quot;,&quot;kana&quot;:&quot;れくいえむ&quot;,&quot;traitText&quot;:null,&quot;ruleText&quot;:&quot;この能力は、自分の墓地か相手の墓地のどちらかから、マリョクでないカード3つ以上を指定して発動できる。そのカードすべてを好きな順番で山札の下に戻して、1ドローする。&quot;,&quot;legacyText&quot;:&quot;手札に戻す&quot;,&quot;imageUrl&quot;:&quot;https://one-draw.jp/ijinden/cardlist/005/card/05_087.png&quot;,&quot;expansion&quot;:55,&quot;rarity&quot;:1,&quot;type&quot;:3,&quot;level&quot;:1,&quot;color&quot;:8,&quot;term&quot;:0,&quot;trait&quot;:0,&quot;power&quot;:null,&quot;legacy&quot;:5,&quot;anyNumCopies&quot;:false,&quot;orderTable&quot;:477,&quot;orderDeck&quot;:363}," calcext:value-type="string">
            <text:p>{"id":"2nd1-87","name":"レクイエム","displayName":"レクイエム (第5弾)","kana":"れくいえむ","traitText":null,"ruleText":"この能力は、自分の墓地か相手の墓地のどちらかから、マリョクでないカード3つ以上を指定して発動できる。そのカードすべてを好きな順番で山札の下に戻して、1ドローする。","legacyText":"手札に戻す","imageUrl":"https://one-draw.jp/ijinden/cardlist/005/card/05_087.png","expansion":55,"rarity":1,"type":3,"level":1,"color":8,"term":0,"trait":0,"power":null,"legacy":5,"anyNumCopies":false,"orderTable":477,"orderDeck":363},</text:p>
          </table:table-cell>
          <table:table-cell table:number-columns-repeated="16356"/>
        </table:table-row>
        <table:table-row table:style-name="ro2">
          <table:table-cell table:style-name="ce11" office:value-type="float" office:value="478" calcext:value-type="float">
            <text:p>478</text:p>
          </table:table-cell>
          <table:table-cell table:style-name="ce11" office:value-type="float" office:value="411" calcext:value-type="float">
            <text:p>411</text:p>
          </table:table-cell>
          <table:table-cell table:formula="of:=CONCATENATE(&quot;2nd1-&quot;;TEXT([.D479];&quot;0&quot;))" office:value-type="string" office:string-value="2nd1-88" calcext:value-type="string">
            <text:p>2nd1-88</text:p>
          </table:table-cell>
          <table:table-cell office:value-type="float" office:value="88" calcext:value-type="float">
            <text:p>88</text:p>
          </table:table-cell>
          <table:table-cell office:value-type="string" calcext:value-type="string">
            <text:p>ショーダウン</text:p>
          </table:table-cell>
          <table:table-cell table:style-name="ce11" table:formula="of:=[.E479]" office:value-type="string" office:string-value="ショーダウン" calcext:value-type="string">
            <text:p>ショーダウン</text:p>
          </table:table-cell>
          <table:table-cell office:value-type="string" calcext:value-type="string">
            <text:p>しょーだうん</text:p>
          </table:table-cell>
          <table:table-cell table:style-name="ce11" office:value-type="string" calcext:value-type="string">
            <text:p>第５弾ブースターパック</text:p>
          </table:table-cell>
          <table:table-cell table:style-name="ce11" table:formula="of:=VLOOKUP([.H479];[$収録番号.$A$1:$収録番号.$B$10];2;0)" office:value-type="float" office:value="55" calcext:value-type="float">
            <text:p>55</text:p>
          </table:table-cell>
          <table:table-cell office:value-type="string" calcext:value-type="string">
            <text:p>R</text:p>
          </table:table-cell>
          <table:table-cell table:style-name="ce11" table:formula="of:=VLOOKUP([.J479];[$レアリティ番号.$A$1:$レアリティ番号.$B$4];2;0)" office:value-type="float" office:value="2" calcext:value-type="float">
            <text:p>2</text:p>
          </table:table-cell>
          <table:table-cell office:value-type="string" calcext:value-type="string">
            <text:p>マホウ</text:p>
          </table:table-cell>
          <table:table-cell table:style-name="ce11" table:formula="of:=VLOOKUP([.L479];[$種類番号.$A$1:$種類番号.$B$4];2;0)" office:value-type="float" office:value="3" calcext:value-type="float">
            <text:p>3</text:p>
          </table:table-cell>
          <table:table-cell office:value-type="string" calcext:value-type="string">
            <text:p>紫</text:p>
          </table:table-cell>
          <table:table-cell table:style-name="ce11" table:formula="of:=VLOOKUP([.N479];[$色番号.$A$1:$色番号.$B$10];2;0)" office:value-type="float" office:value="16" calcext:value-type="float">
            <text:p>16</text:p>
          </table:table-cell>
          <table:table-cell office:value-type="float" office:value="4" calcext:value-type="float">
            <text:p>4</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47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79];[$特性番号.$A$1:$特性番号.$B$8];2;0);0)" office:value-type="float" office:value="0" calcext:value-type="float">
            <text:p>0</text:p>
          </table:table-cell>
          <table:table-cell office:value-type="string" calcext:value-type="string">
            <text:p>自分と相手の手札のカードすべてを公開して、それぞれのレベルの合計が低い方のプレイヤーの手札のカードすべてを墓地に置く。</text:p>
          </table:table-cell>
          <table:table-cell table:style-name="ce25" table:formula="of:=NA()" office:value-type="string" office:string-value="" calcext:value-type="error">
            <text:p>#N/A</text:p>
          </table:table-cell>
          <table:table-cell office:value-type="string" calcext:value-type="string">
            <text:p>魔力化</text:p>
          </table:table-cell>
          <table:table-cell table:style-name="ce11" table:formula="of:=IFERROR(VLOOKUP([.$X479];[$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88.png</text:p>
          </table:table-cell>
          <table:table-cell table:style-name="ce11" table:formula="of:=CONCATENATE([$JSON.$A$1];[.$C479];[$JSON.$B$1];[.$E479];[$JSON.$C$1];[.F479];[$JSON.$D$1];[.$G479];[$JSON.$E$1];IF(ISNA([.$T479]);&quot;null&quot;;&quot;&quot;&quot;&quot;&amp;[.$T479]&amp;&quot;&quot;&quot;&quot;);[$JSON.$F$1];[.$V479];[$JSON.$G$1];IF(ISNA([.$X479]);&quot;null&quot;;&quot;&quot;&quot;&quot;&amp;[.$X479]&amp;&quot;&quot;&quot;&quot;);[$JSON.$H$1];[.$AA479];[$JSON.$I$1];[.$I479];[$JSON.$J$1];[.K479];[$JSON.$K$1];[.$M479];[$JSON.$L$1];[.$P479];[$JSON.$M$1];[.$O479];[$JSON.$N$1];[.$S479];[$JSON.$O$1];[.$U479];[$JSON.$P$1];IF(ISNA([.$W479]);&quot;null&quot;;[.$W479]);[$JSON.$Q$1];[.$Y479];[$JSON.$R$1];IF([.$Z479];&quot;true&quot;;&quot;false&quot;);[$JSON.$S$1];[.$A479];[$JSON.$T$1];[.$B479];[$JSON.$U$1])" office:value-type="string" office:string-value="{&quot;id&quot;:&quot;2nd1-88&quot;,&quot;name&quot;:&quot;ショーダウン&quot;,&quot;displayName&quot;:&quot;ショーダウン&quot;,&quot;kana&quot;:&quot;しょーだうん&quot;,&quot;traitText&quot;:null,&quot;ruleText&quot;:&quot;自分と相手の手札のカードすべてを公開して、それぞれのレベルの合計が低い方のプレイヤーの手札のカードすべてを墓地に置く。&quot;,&quot;legacyText&quot;:&quot;魔力化&quot;,&quot;imageUrl&quot;:&quot;https://one-draw.jp/ijinden/cardlist/005/card/05_088.png&quot;,&quot;expansion&quot;:55,&quot;rarity&quot;:2,&quot;type&quot;:3,&quot;level&quot;:4,&quot;color&quot;:16,&quot;term&quot;:0,&quot;trait&quot;:0,&quot;power&quot;:null,&quot;legacy&quot;:1,&quot;anyNumCopies&quot;:false,&quot;orderTable&quot;:478,&quot;orderDeck&quot;:411}," calcext:value-type="string">
            <text:p>{"id":"2nd1-88","name":"ショーダウン","displayName":"ショーダウン","kana":"しょーだうん","traitText":null,"ruleText":"自分と相手の手札のカードすべてを公開して、それぞれのレベルの合計が低い方のプレイヤーの手札のカードすべてを墓地に置く。","legacyText":"魔力化","imageUrl":"https://one-draw.jp/ijinden/cardlist/005/card/05_088.png","expansion":55,"rarity":2,"type":3,"level":4,"color":16,"term":0,"trait":0,"power":null,"legacy":1,"anyNumCopies":false,"orderTable":478,"orderDeck":411},</text:p>
          </table:table-cell>
          <table:table-cell table:number-columns-repeated="16356"/>
        </table:table-row>
        <table:table-row table:style-name="ro2">
          <table:table-cell table:style-name="ce11" office:value-type="float" office:value="479" calcext:value-type="float">
            <text:p>479</text:p>
          </table:table-cell>
          <table:table-cell table:style-name="ce11" office:value-type="float" office:value="421" calcext:value-type="float">
            <text:p>421</text:p>
          </table:table-cell>
          <table:table-cell table:formula="of:=CONCATENATE(&quot;2nd1-&quot;;TEXT([.D480];&quot;0&quot;))" office:value-type="string" office:string-value="2nd1-89" calcext:value-type="string">
            <text:p>2nd1-89</text:p>
          </table:table-cell>
          <table:table-cell office:value-type="float" office:value="89" calcext:value-type="float">
            <text:p>89</text:p>
          </table:table-cell>
          <table:table-cell office:value-type="string" calcext:value-type="string">
            <text:p>ナイトメア</text:p>
          </table:table-cell>
          <table:table-cell table:style-name="ce11" table:formula="of:=[.E480]" office:value-type="string" office:string-value="ナイトメア" calcext:value-type="string">
            <text:p>ナイトメア</text:p>
          </table:table-cell>
          <table:table-cell office:value-type="string" calcext:value-type="string">
            <text:p>ないとめあ</text:p>
          </table:table-cell>
          <table:table-cell table:style-name="ce11" office:value-type="string" calcext:value-type="string">
            <text:p>第５弾ブースターパック</text:p>
          </table:table-cell>
          <table:table-cell table:style-name="ce11" table:formula="of:=VLOOKUP([.H480];[$収録番号.$A$1:$収録番号.$B$10];2;0)" office:value-type="float" office:value="55" calcext:value-type="float">
            <text:p>55</text:p>
          </table:table-cell>
          <table:table-cell office:value-type="string" calcext:value-type="string">
            <text:p>N</text:p>
          </table:table-cell>
          <table:table-cell table:style-name="ce11" table:formula="of:=VLOOKUP([.J480];[$レアリティ番号.$A$1:$レアリティ番号.$B$4];2;0)" office:value-type="float" office:value="1" calcext:value-type="float">
            <text:p>1</text:p>
          </table:table-cell>
          <table:table-cell office:value-type="string" calcext:value-type="string">
            <text:p>マホウ</text:p>
          </table:table-cell>
          <table:table-cell table:style-name="ce11" table:formula="of:=VLOOKUP([.L480];[$種類番号.$A$1:$種類番号.$B$4];2;0)" office:value-type="float" office:value="3" calcext:value-type="float">
            <text:p>3</text:p>
          </table:table-cell>
          <table:table-cell office:value-type="string" calcext:value-type="string">
            <text:p>紫</text:p>
          </table:table-cell>
          <table:table-cell table:style-name="ce11" table:formula="of:=VLOOKUP([.N480];[$色番号.$A$1:$色番号.$B$10];2;0)" office:value-type="float" office:value="16" calcext:value-type="float">
            <text:p>16</text:p>
          </table:table-cell>
          <table:table-cell office:value-type="float" office:value="5" calcext:value-type="float">
            <text:p>5</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IFERROR(VLOOKUP([.$R48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80];[$特性番号.$A$1:$特性番号.$B$8];2;0);0)" office:value-type="float" office:value="0" calcext:value-type="float">
            <text:p>0</text:p>
          </table:table-cell>
          <table:table-cell office:value-type="string" calcext:value-type="string">
            <text:p>自分と相手の戦場の寝ているカード1つにつき3つ、相手の山札の上からカードを墓地に置く。</text:p>
          </table:table-cell>
          <table:table-cell table:style-name="ce25" table:formula="of:=NA()" office:value-type="string" office:string-value="" calcext:value-type="error">
            <text:p>#N/A</text:p>
          </table:table-cell>
          <table:table-cell office:value-type="string" calcext:value-type="string">
            <text:p>魔力化</text:p>
          </table:table-cell>
          <table:table-cell table:style-name="ce11" table:formula="of:=IFERROR(VLOOKUP([.$X480];[$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89.png</text:p>
          </table:table-cell>
          <table:table-cell table:style-name="ce11" table:formula="of:=CONCATENATE([$JSON.$A$1];[.$C480];[$JSON.$B$1];[.$E480];[$JSON.$C$1];[.F480];[$JSON.$D$1];[.$G480];[$JSON.$E$1];IF(ISNA([.$T480]);&quot;null&quot;;&quot;&quot;&quot;&quot;&amp;[.$T480]&amp;&quot;&quot;&quot;&quot;);[$JSON.$F$1];[.$V480];[$JSON.$G$1];IF(ISNA([.$X480]);&quot;null&quot;;&quot;&quot;&quot;&quot;&amp;[.$X480]&amp;&quot;&quot;&quot;&quot;);[$JSON.$H$1];[.$AA480];[$JSON.$I$1];[.$I480];[$JSON.$J$1];[.K480];[$JSON.$K$1];[.$M480];[$JSON.$L$1];[.$P480];[$JSON.$M$1];[.$O480];[$JSON.$N$1];[.$S480];[$JSON.$O$1];[.$U480];[$JSON.$P$1];IF(ISNA([.$W480]);&quot;null&quot;;[.$W480]);[$JSON.$Q$1];[.$Y480];[$JSON.$R$1];IF([.$Z480];&quot;true&quot;;&quot;false&quot;);[$JSON.$S$1];[.$A480];[$JSON.$T$1];[.$B480];[$JSON.$U$1])" office:value-type="string" office:string-value="{&quot;id&quot;:&quot;2nd1-89&quot;,&quot;name&quot;:&quot;ナイトメア&quot;,&quot;displayName&quot;:&quot;ナイトメア&quot;,&quot;kana&quot;:&quot;ないとめあ&quot;,&quot;traitText&quot;:null,&quot;ruleText&quot;:&quot;自分と相手の戦場の寝ているカード1つにつき3つ、相手の山札の上からカードを墓地に置く。&quot;,&quot;legacyText&quot;:&quot;魔力化&quot;,&quot;imageUrl&quot;:&quot;https://one-draw.jp/ijinden/cardlist/005/card/05_089.png&quot;,&quot;expansion&quot;:55,&quot;rarity&quot;:1,&quot;type&quot;:3,&quot;level&quot;:5,&quot;color&quot;:16,&quot;term&quot;:0,&quot;trait&quot;:0,&quot;power&quot;:null,&quot;legacy&quot;:1,&quot;anyNumCopies&quot;:false,&quot;orderTable&quot;:479,&quot;orderDeck&quot;:421}," calcext:value-type="string">
            <text:p>{"id":"2nd1-89","name":"ナイトメア","displayName":"ナイトメア","kana":"ないとめあ","traitText":null,"ruleText":"自分と相手の戦場の寝ているカード1つにつき3つ、相手の山札の上からカードを墓地に置く。","legacyText":"魔力化","imageUrl":"https://one-draw.jp/ijinden/cardlist/005/card/05_089.png","expansion":55,"rarity":1,"type":3,"level":5,"color":16,"term":0,"trait":0,"power":null,"legacy":1,"anyNumCopies":false,"orderTable":479,"orderDeck":421},</text:p>
          </table:table-cell>
          <table:table-cell table:number-columns-repeated="16356"/>
        </table:table-row>
        <table:table-row table:style-name="ro2">
          <table:table-cell table:style-name="ce11" office:value-type="float" office:value="480" calcext:value-type="float">
            <text:p>480</text:p>
          </table:table-cell>
          <table:table-cell table:style-name="ce11" office:value-type="float" office:value="425" calcext:value-type="float">
            <text:p>425</text:p>
          </table:table-cell>
          <table:table-cell table:formula="of:=CONCATENATE(&quot;2nd1-&quot;;TEXT([.D481];&quot;0&quot;))" office:value-type="string" office:string-value="2nd1-90" calcext:value-type="string">
            <text:p>2nd1-90</text:p>
          </table:table-cell>
          <table:table-cell office:value-type="float" office:value="90" calcext:value-type="float">
            <text:p>90</text:p>
          </table:table-cell>
          <table:table-cell office:value-type="string" calcext:value-type="string">
            <text:p>クリアボヤンス</text:p>
          </table:table-cell>
          <table:table-cell table:style-name="ce11" table:formula="of:=[.E481]" office:value-type="string" office:string-value="クリアボヤンス" calcext:value-type="string">
            <text:p>クリアボヤンス</text:p>
          </table:table-cell>
          <table:table-cell office:value-type="string" calcext:value-type="string">
            <text:p>くりあぼやんす</text:p>
          </table:table-cell>
          <table:table-cell table:style-name="ce11" office:value-type="string" calcext:value-type="string">
            <text:p>第５弾ブースターパック</text:p>
          </table:table-cell>
          <table:table-cell table:style-name="ce11" table:formula="of:=VLOOKUP([.H481];[$収録番号.$A$1:$収録番号.$B$10];2;0)" office:value-type="float" office:value="55" calcext:value-type="float">
            <text:p>55</text:p>
          </table:table-cell>
          <table:table-cell office:value-type="string" calcext:value-type="string">
            <text:p>N</text:p>
          </table:table-cell>
          <table:table-cell table:style-name="ce11" table:formula="of:=VLOOKUP([.J481];[$レアリティ番号.$A$1:$レアリティ番号.$B$4];2;0)" office:value-type="float" office:value="1" calcext:value-type="float">
            <text:p>1</text:p>
          </table:table-cell>
          <table:table-cell office:value-type="string" calcext:value-type="string">
            <text:p>マホウ</text:p>
          </table:table-cell>
          <table:table-cell table:style-name="ce11" table:formula="of:=VLOOKUP([.L481];[$種類番号.$A$1:$種類番号.$B$4];2;0)" office:value-type="float" office:value="3" calcext:value-type="float">
            <text:p>3</text:p>
          </table:table-cell>
          <table:table-cell office:value-type="string" calcext:value-type="string">
            <text:p>紫</text:p>
          </table:table-cell>
          <table:table-cell table:style-name="ce11" table:formula="of:=VLOOKUP([.N481];[$色番号.$A$1:$色番号.$B$10];2;0)" office:value-type="float" office:value="16" calcext:value-type="float">
            <text:p>16</text:p>
          </table:table-cell>
          <table:table-cell office:value-type="float" office:value="6" calcext:value-type="float">
            <text:p>6</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IFERROR(VLOOKUP([.$R48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81];[$特性番号.$A$1:$特性番号.$B$8];2;0);0)" office:value-type="float" office:value="0" calcext:value-type="float">
            <text:p>0</text:p>
          </table:table-cell>
          <table:table-cell office:value-type="string" calcext:value-type="string">
            <text:p>相手の戦場と相手の魔力ゾーンの、裏のカードすべての表を見る。</text:p>
          </table:table-cell>
          <table:table-cell table:style-name="ce25" table:formula="of:=NA()" office:value-type="string" office:string-value="" calcext:value-type="error">
            <text:p>#N/A</text:p>
          </table:table-cell>
          <table:table-cell office:value-type="string" calcext:value-type="string">
            <text:p>魔力化</text:p>
          </table:table-cell>
          <table:table-cell table:style-name="ce11" table:formula="of:=IFERROR(VLOOKUP([.$X481];[$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090.png</text:p>
          </table:table-cell>
          <table:table-cell table:style-name="ce11" table:formula="of:=CONCATENATE([$JSON.$A$1];[.$C481];[$JSON.$B$1];[.$E481];[$JSON.$C$1];[.F481];[$JSON.$D$1];[.$G481];[$JSON.$E$1];IF(ISNA([.$T481]);&quot;null&quot;;&quot;&quot;&quot;&quot;&amp;[.$T481]&amp;&quot;&quot;&quot;&quot;);[$JSON.$F$1];[.$V481];[$JSON.$G$1];IF(ISNA([.$X481]);&quot;null&quot;;&quot;&quot;&quot;&quot;&amp;[.$X481]&amp;&quot;&quot;&quot;&quot;);[$JSON.$H$1];[.$AA481];[$JSON.$I$1];[.$I481];[$JSON.$J$1];[.K481];[$JSON.$K$1];[.$M481];[$JSON.$L$1];[.$P481];[$JSON.$M$1];[.$O481];[$JSON.$N$1];[.$S481];[$JSON.$O$1];[.$U481];[$JSON.$P$1];IF(ISNA([.$W481]);&quot;null&quot;;[.$W481]);[$JSON.$Q$1];[.$Y481];[$JSON.$R$1];IF([.$Z481];&quot;true&quot;;&quot;false&quot;);[$JSON.$S$1];[.$A481];[$JSON.$T$1];[.$B481];[$JSON.$U$1])" office:value-type="string" office:string-value="{&quot;id&quot;:&quot;2nd1-90&quot;,&quot;name&quot;:&quot;クリアボヤンス&quot;,&quot;displayName&quot;:&quot;クリアボヤンス&quot;,&quot;kana&quot;:&quot;くりあぼやんす&quot;,&quot;traitText&quot;:null,&quot;ruleText&quot;:&quot;相手の戦場と相手の魔力ゾーンの、裏のカードすべての表を見る。&quot;,&quot;legacyText&quot;:&quot;魔力化&quot;,&quot;imageUrl&quot;:&quot;https://one-draw.jp/ijinden/cardlist/005/card/05_090.png&quot;,&quot;expansion&quot;:55,&quot;rarity&quot;:1,&quot;type&quot;:3,&quot;level&quot;:6,&quot;color&quot;:16,&quot;term&quot;:0,&quot;trait&quot;:0,&quot;power&quot;:null,&quot;legacy&quot;:1,&quot;anyNumCopies&quot;:false,&quot;orderTable&quot;:480,&quot;orderDeck&quot;:425}," calcext:value-type="string">
            <text:p>{"id":"2nd1-90","name":"クリアボヤンス","displayName":"クリアボヤンス","kana":"くりあぼやんす","traitText":null,"ruleText":"相手の戦場と相手の魔力ゾーンの、裏のカードすべての表を見る。","legacyText":"魔力化","imageUrl":"https://one-draw.jp/ijinden/cardlist/005/card/05_090.png","expansion":55,"rarity":1,"type":3,"level":6,"color":16,"term":0,"trait":0,"power":null,"legacy":1,"anyNumCopies":false,"orderTable":480,"orderDeck":425},</text:p>
          </table:table-cell>
          <table:table-cell table:number-columns-repeated="16356"/>
        </table:table-row>
        <table:table-row table:style-name="ro2">
          <table:table-cell table:style-name="ce11" office:value-type="float" office:value="481" calcext:value-type="float">
            <text:p>481</text:p>
          </table:table-cell>
          <table:table-cell table:style-name="ce11" office:value-type="float" office:value="441" calcext:value-type="float">
            <text:p>441</text:p>
          </table:table-cell>
          <table:table-cell table:formula="of:=CONCATENATE(&quot;2nd1-&quot;;TEXT([.D482];&quot;0&quot;))" office:value-type="string" office:string-value="2nd1-91" calcext:value-type="string">
            <text:p>2nd1-91</text:p>
          </table:table-cell>
          <table:table-cell office:value-type="float" office:value="91" calcext:value-type="float">
            <text:p>91</text:p>
          </table:table-cell>
          <table:table-cell office:value-type="string" calcext:value-type="string">
            <text:p>レッドストーン</text:p>
          </table:table-cell>
          <table:table-cell office:value-type="string" calcext:value-type="string">
            <text:p>レッドストーン (第5弾)</text:p>
          </table:table-cell>
          <table:table-cell office:value-type="string" calcext:value-type="string">
            <text:p>れっどすとーん</text:p>
          </table:table-cell>
          <table:table-cell table:style-name="ce11" office:value-type="string" calcext:value-type="string">
            <text:p>第５弾ブースターパック</text:p>
          </table:table-cell>
          <table:table-cell table:style-name="ce11" table:formula="of:=VLOOKUP([.H482];[$収録番号.$A$1:$収録番号.$B$10];2;0)" office:value-type="float" office:value="55" calcext:value-type="float">
            <text:p>55</text:p>
          </table:table-cell>
          <table:table-cell office:value-type="string" calcext:value-type="string">
            <text:p>N</text:p>
          </table:table-cell>
          <table:table-cell table:style-name="ce11" table:formula="of:=VLOOKUP([.J482];[$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482];[$種類番号.$A$1:$種類番号.$B$4];2;0)" office:value-type="float" office:value="4" calcext:value-type="float">
            <text:p>4</text:p>
          </table:table-cell>
          <table:table-cell office:value-type="string" calcext:value-type="string">
            <text:p>赤</text:p>
          </table:table-cell>
          <table:table-cell table:style-name="ce11" table:formula="of:=VLOOKUP([.N482];[$色番号.$A$1:$色番号.$B$10];2;0)" office:value-type="float" office:value="1" calcext:value-type="float">
            <text:p>1</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82];[$特性番号.$A$1:$特性番号.$B$8];2;0);0)" office:value-type="float" office:value="0" calcext:value-type="float">
            <text:p>0</text:p>
          </table:table-cell>
          <table:table-cell office:value-type="string" calcext:value-type="string">
            <text:p>※ デッキに何枚でも入れてよい。</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82];[$遺業能力番号.$A$1:$遺業能力番号.$B$9];2;0);0)" office:value-type="float" office:value="3" calcext:value-type="float">
            <text:p>3</text:p>
          </table:table-cell>
          <table:table-cell table:style-name="ce28" office:value-type="boolean" office:boolean-value="true" calcext:value-type="boolean">
            <text:p>TRUE</text:p>
          </table:table-cell>
          <table:table-cell office:value-type="string" calcext:value-type="string">
            <text:p>https://one-draw.jp/ijinden/cardlist/005/card/05_091.png</text:p>
          </table:table-cell>
          <table:table-cell table:style-name="ce11" table:formula="of:=CONCATENATE([$JSON.$A$1];[.$C482];[$JSON.$B$1];[.$E482];[$JSON.$C$1];[.F482];[$JSON.$D$1];[.$G482];[$JSON.$E$1];IF(ISNA([.$T482]);&quot;null&quot;;&quot;&quot;&quot;&quot;&amp;[.$T482]&amp;&quot;&quot;&quot;&quot;);[$JSON.$F$1];[.$V482];[$JSON.$G$1];IF(ISNA([.$X482]);&quot;null&quot;;&quot;&quot;&quot;&quot;&amp;[.$X482]&amp;&quot;&quot;&quot;&quot;);[$JSON.$H$1];[.$AA482];[$JSON.$I$1];[.$I482];[$JSON.$J$1];[.K482];[$JSON.$K$1];[.$M482];[$JSON.$L$1];[.$P482];[$JSON.$M$1];[.$O482];[$JSON.$N$1];[.$S482];[$JSON.$O$1];[.$U482];[$JSON.$P$1];IF(ISNA([.$W482]);&quot;null&quot;;[.$W482]);[$JSON.$Q$1];[.$Y482];[$JSON.$R$1];IF([.$Z482];&quot;true&quot;;&quot;false&quot;);[$JSON.$S$1];[.$A482];[$JSON.$T$1];[.$B482];[$JSON.$U$1])" office:value-type="string" office:string-value="{&quot;id&quot;:&quot;2nd1-91&quot;,&quot;name&quot;:&quot;レッドストーン&quot;,&quot;displayName&quot;:&quot;レッドストーン (第5弾)&quot;,&quot;kana&quot;:&quot;れっどすとーん&quot;,&quot;traitText&quot;:null,&quot;ruleText&quot;:&quot;※ デッキに何枚でも入れてよい。&quot;,&quot;legacyText&quot;:&quot;復元&quot;,&quot;imageUrl&quot;:&quot;https://one-draw.jp/ijinden/cardlist/005/card/05_091.png&quot;,&quot;expansion&quot;:55,&quot;rarity&quot;:1,&quot;type&quot;:4,&quot;level&quot;:1,&quot;color&quot;:1,&quot;term&quot;:0,&quot;trait&quot;:0,&quot;power&quot;:null,&quot;legacy&quot;:3,&quot;anyNumCopies&quot;:true,&quot;orderTable&quot;:481,&quot;orderDeck&quot;:441}," calcext:value-type="string">
            <text:p>{"id":"2nd1-91","name":"レッドストーン","displayName":"レッドストーン (第5弾)","kana":"れっどすとーん","traitText":null,"ruleText":"※ デッキに何枚でも入れてよい。","legacyText":"復元","imageUrl":"https://one-draw.jp/ijinden/cardlist/005/card/05_091.png","expansion":55,"rarity":1,"type":4,"level":1,"color":1,"term":0,"trait":0,"power":null,"legacy":3,"anyNumCopies":true,"orderTable":481,"orderDeck":441},</text:p>
          </table:table-cell>
          <table:table-cell table:number-columns-repeated="16356"/>
        </table:table-row>
        <table:table-row table:style-name="ro2">
          <table:table-cell table:style-name="ce11" office:value-type="float" office:value="482" calcext:value-type="float">
            <text:p>482</text:p>
          </table:table-cell>
          <table:table-cell table:style-name="ce11" office:value-type="float" office:value="448" calcext:value-type="float">
            <text:p>448</text:p>
          </table:table-cell>
          <table:table-cell table:formula="of:=CONCATENATE(&quot;2nd1-&quot;;TEXT([.D483];&quot;0&quot;))" office:value-type="string" office:string-value="2nd1-92" calcext:value-type="string">
            <text:p>2nd1-92</text:p>
          </table:table-cell>
          <table:table-cell office:value-type="float" office:value="92" calcext:value-type="float">
            <text:p>92</text:p>
          </table:table-cell>
          <table:table-cell office:value-type="string" calcext:value-type="string">
            <text:p>ブルーストーン</text:p>
          </table:table-cell>
          <table:table-cell office:value-type="string" calcext:value-type="string">
            <text:p>ブルーストーン (第5弾)</text:p>
          </table:table-cell>
          <table:table-cell office:value-type="string" calcext:value-type="string">
            <text:p>ぶるーすとーん</text:p>
          </table:table-cell>
          <table:table-cell table:style-name="ce11" office:value-type="string" calcext:value-type="string">
            <text:p>第５弾ブースターパック</text:p>
          </table:table-cell>
          <table:table-cell table:style-name="ce11" table:formula="of:=VLOOKUP([.H483];[$収録番号.$A$1:$収録番号.$B$10];2;0)" office:value-type="float" office:value="55" calcext:value-type="float">
            <text:p>55</text:p>
          </table:table-cell>
          <table:table-cell office:value-type="string" calcext:value-type="string">
            <text:p>N</text:p>
          </table:table-cell>
          <table:table-cell table:style-name="ce11" table:formula="of:=VLOOKUP([.J483];[$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483];[$種類番号.$A$1:$種類番号.$B$4];2;0)" office:value-type="float" office:value="4" calcext:value-type="float">
            <text:p>4</text:p>
          </table:table-cell>
          <table:table-cell office:value-type="string" calcext:value-type="string">
            <text:p>青</text:p>
          </table:table-cell>
          <table:table-cell table:style-name="ce11" table:formula="of:=VLOOKUP([.N483];[$色番号.$A$1:$色番号.$B$10];2;0)" office:value-type="float" office:value="2" calcext:value-type="float">
            <text:p>2</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83];[$特性番号.$A$1:$特性番号.$B$8];2;0);0)" office:value-type="float" office:value="0" calcext:value-type="float">
            <text:p>0</text:p>
          </table:table-cell>
          <table:table-cell office:value-type="string" calcext:value-type="string">
            <text:p>※ デッキに何枚でも入れてよい。</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83];[$遺業能力番号.$A$1:$遺業能力番号.$B$9];2;0);0)" office:value-type="float" office:value="3" calcext:value-type="float">
            <text:p>3</text:p>
          </table:table-cell>
          <table:table-cell table:style-name="ce28" office:value-type="boolean" office:boolean-value="true" calcext:value-type="boolean">
            <text:p>TRUE</text:p>
          </table:table-cell>
          <table:table-cell office:value-type="string" calcext:value-type="string">
            <text:p>https://one-draw.jp/ijinden/cardlist/005/card/05_092.png</text:p>
          </table:table-cell>
          <table:table-cell table:style-name="ce11" table:formula="of:=CONCATENATE([$JSON.$A$1];[.$C483];[$JSON.$B$1];[.$E483];[$JSON.$C$1];[.F483];[$JSON.$D$1];[.$G483];[$JSON.$E$1];IF(ISNA([.$T483]);&quot;null&quot;;&quot;&quot;&quot;&quot;&amp;[.$T483]&amp;&quot;&quot;&quot;&quot;);[$JSON.$F$1];[.$V483];[$JSON.$G$1];IF(ISNA([.$X483]);&quot;null&quot;;&quot;&quot;&quot;&quot;&amp;[.$X483]&amp;&quot;&quot;&quot;&quot;);[$JSON.$H$1];[.$AA483];[$JSON.$I$1];[.$I483];[$JSON.$J$1];[.K483];[$JSON.$K$1];[.$M483];[$JSON.$L$1];[.$P483];[$JSON.$M$1];[.$O483];[$JSON.$N$1];[.$S483];[$JSON.$O$1];[.$U483];[$JSON.$P$1];IF(ISNA([.$W483]);&quot;null&quot;;[.$W483]);[$JSON.$Q$1];[.$Y483];[$JSON.$R$1];IF([.$Z483];&quot;true&quot;;&quot;false&quot;);[$JSON.$S$1];[.$A483];[$JSON.$T$1];[.$B483];[$JSON.$U$1])" office:value-type="string" office:string-value="{&quot;id&quot;:&quot;2nd1-92&quot;,&quot;name&quot;:&quot;ブルーストーン&quot;,&quot;displayName&quot;:&quot;ブルーストーン (第5弾)&quot;,&quot;kana&quot;:&quot;ぶるーすとーん&quot;,&quot;traitText&quot;:null,&quot;ruleText&quot;:&quot;※ デッキに何枚でも入れてよい。&quot;,&quot;legacyText&quot;:&quot;復元&quot;,&quot;imageUrl&quot;:&quot;https://one-draw.jp/ijinden/cardlist/005/card/05_092.png&quot;,&quot;expansion&quot;:55,&quot;rarity&quot;:1,&quot;type&quot;:4,&quot;level&quot;:1,&quot;color&quot;:2,&quot;term&quot;:0,&quot;trait&quot;:0,&quot;power&quot;:null,&quot;legacy&quot;:3,&quot;anyNumCopies&quot;:true,&quot;orderTable&quot;:482,&quot;orderDeck&quot;:448}," calcext:value-type="string">
            <text:p>{"id":"2nd1-92","name":"ブルーストーン","displayName":"ブルーストーン (第5弾)","kana":"ぶるーすとーん","traitText":null,"ruleText":"※ デッキに何枚でも入れてよい。","legacyText":"復元","imageUrl":"https://one-draw.jp/ijinden/cardlist/005/card/05_092.png","expansion":55,"rarity":1,"type":4,"level":1,"color":2,"term":0,"trait":0,"power":null,"legacy":3,"anyNumCopies":true,"orderTable":482,"orderDeck":448},</text:p>
          </table:table-cell>
          <table:table-cell table:number-columns-repeated="16356"/>
        </table:table-row>
        <table:table-row table:style-name="ro2">
          <table:table-cell table:style-name="ce11" office:value-type="float" office:value="483" calcext:value-type="float">
            <text:p>483</text:p>
          </table:table-cell>
          <table:table-cell table:style-name="ce11" office:value-type="float" office:value="455" calcext:value-type="float">
            <text:p>455</text:p>
          </table:table-cell>
          <table:table-cell table:formula="of:=CONCATENATE(&quot;2nd1-&quot;;TEXT([.D484];&quot;0&quot;))" office:value-type="string" office:string-value="2nd1-93" calcext:value-type="string">
            <text:p>2nd1-93</text:p>
          </table:table-cell>
          <table:table-cell office:value-type="float" office:value="93" calcext:value-type="float">
            <text:p>93</text:p>
          </table:table-cell>
          <table:table-cell office:value-type="string" calcext:value-type="string">
            <text:p>グリーンストーン</text:p>
          </table:table-cell>
          <table:table-cell office:value-type="string" calcext:value-type="string">
            <text:p>グリーンストーン (第5弾)</text:p>
          </table:table-cell>
          <table:table-cell office:value-type="string" calcext:value-type="string">
            <text:p>ぐりーんすとーん</text:p>
          </table:table-cell>
          <table:table-cell table:style-name="ce11" office:value-type="string" calcext:value-type="string">
            <text:p>第５弾ブースターパック</text:p>
          </table:table-cell>
          <table:table-cell table:style-name="ce11" table:formula="of:=VLOOKUP([.H484];[$収録番号.$A$1:$収録番号.$B$10];2;0)" office:value-type="float" office:value="55" calcext:value-type="float">
            <text:p>55</text:p>
          </table:table-cell>
          <table:table-cell office:value-type="string" calcext:value-type="string">
            <text:p>N</text:p>
          </table:table-cell>
          <table:table-cell table:style-name="ce11" table:formula="of:=VLOOKUP([.J484];[$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484];[$種類番号.$A$1:$種類番号.$B$4];2;0)" office:value-type="float" office:value="4" calcext:value-type="float">
            <text:p>4</text:p>
          </table:table-cell>
          <table:table-cell office:value-type="string" calcext:value-type="string">
            <text:p>緑</text:p>
          </table:table-cell>
          <table:table-cell table:style-name="ce11" table:formula="of:=VLOOKUP([.N484];[$色番号.$A$1:$色番号.$B$10];2;0)" office:value-type="float" office:value="4" calcext:value-type="float">
            <text:p>4</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84];[$特性番号.$A$1:$特性番号.$B$8];2;0);0)" office:value-type="float" office:value="0" calcext:value-type="float">
            <text:p>0</text:p>
          </table:table-cell>
          <table:table-cell office:value-type="string" calcext:value-type="string">
            <text:p>※ デッキに何枚でも入れてよい。</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84];[$遺業能力番号.$A$1:$遺業能力番号.$B$9];2;0);0)" office:value-type="float" office:value="3" calcext:value-type="float">
            <text:p>3</text:p>
          </table:table-cell>
          <table:table-cell table:style-name="ce28" office:value-type="boolean" office:boolean-value="true" calcext:value-type="boolean">
            <text:p>TRUE</text:p>
          </table:table-cell>
          <table:table-cell office:value-type="string" calcext:value-type="string">
            <text:p>https://one-draw.jp/ijinden/cardlist/005/card/05_093.png</text:p>
          </table:table-cell>
          <table:table-cell table:style-name="ce11" table:formula="of:=CONCATENATE([$JSON.$A$1];[.$C484];[$JSON.$B$1];[.$E484];[$JSON.$C$1];[.F484];[$JSON.$D$1];[.$G484];[$JSON.$E$1];IF(ISNA([.$T484]);&quot;null&quot;;&quot;&quot;&quot;&quot;&amp;[.$T484]&amp;&quot;&quot;&quot;&quot;);[$JSON.$F$1];[.$V484];[$JSON.$G$1];IF(ISNA([.$X484]);&quot;null&quot;;&quot;&quot;&quot;&quot;&amp;[.$X484]&amp;&quot;&quot;&quot;&quot;);[$JSON.$H$1];[.$AA484];[$JSON.$I$1];[.$I484];[$JSON.$J$1];[.K484];[$JSON.$K$1];[.$M484];[$JSON.$L$1];[.$P484];[$JSON.$M$1];[.$O484];[$JSON.$N$1];[.$S484];[$JSON.$O$1];[.$U484];[$JSON.$P$1];IF(ISNA([.$W484]);&quot;null&quot;;[.$W484]);[$JSON.$Q$1];[.$Y484];[$JSON.$R$1];IF([.$Z484];&quot;true&quot;;&quot;false&quot;);[$JSON.$S$1];[.$A484];[$JSON.$T$1];[.$B484];[$JSON.$U$1])" office:value-type="string" office:string-value="{&quot;id&quot;:&quot;2nd1-93&quot;,&quot;name&quot;:&quot;グリーンストーン&quot;,&quot;displayName&quot;:&quot;グリーンストーン (第5弾)&quot;,&quot;kana&quot;:&quot;ぐりーんすとーん&quot;,&quot;traitText&quot;:null,&quot;ruleText&quot;:&quot;※ デッキに何枚でも入れてよい。&quot;,&quot;legacyText&quot;:&quot;復元&quot;,&quot;imageUrl&quot;:&quot;https://one-draw.jp/ijinden/cardlist/005/card/05_093.png&quot;,&quot;expansion&quot;:55,&quot;rarity&quot;:1,&quot;type&quot;:4,&quot;level&quot;:1,&quot;color&quot;:4,&quot;term&quot;:0,&quot;trait&quot;:0,&quot;power&quot;:null,&quot;legacy&quot;:3,&quot;anyNumCopies&quot;:true,&quot;orderTable&quot;:483,&quot;orderDeck&quot;:455}," calcext:value-type="string">
            <text:p>{"id":"2nd1-93","name":"グリーンストーン","displayName":"グリーンストーン (第5弾)","kana":"ぐりーんすとーん","traitText":null,"ruleText":"※ デッキに何枚でも入れてよい。","legacyText":"復元","imageUrl":"https://one-draw.jp/ijinden/cardlist/005/card/05_093.png","expansion":55,"rarity":1,"type":4,"level":1,"color":4,"term":0,"trait":0,"power":null,"legacy":3,"anyNumCopies":true,"orderTable":483,"orderDeck":455},</text:p>
          </table:table-cell>
          <table:table-cell table:number-columns-repeated="16356"/>
        </table:table-row>
        <table:table-row table:style-name="ro2">
          <table:table-cell table:style-name="ce11" office:value-type="float" office:value="484" calcext:value-type="float">
            <text:p>484</text:p>
          </table:table-cell>
          <table:table-cell table:style-name="ce11" office:value-type="float" office:value="461" calcext:value-type="float">
            <text:p>461</text:p>
          </table:table-cell>
          <table:table-cell table:formula="of:=CONCATENATE(&quot;2nd1-&quot;;TEXT([.D485];&quot;0&quot;))" office:value-type="string" office:string-value="2nd1-94" calcext:value-type="string">
            <text:p>2nd1-94</text:p>
          </table:table-cell>
          <table:table-cell office:value-type="float" office:value="94" calcext:value-type="float">
            <text:p>94</text:p>
          </table:table-cell>
          <table:table-cell office:value-type="string" calcext:value-type="string">
            <text:p>イエローストーン</text:p>
          </table:table-cell>
          <table:table-cell office:value-type="string" calcext:value-type="string">
            <text:p>イエローストーン (第5弾)</text:p>
          </table:table-cell>
          <table:table-cell office:value-type="string" calcext:value-type="string">
            <text:p>いえろーすとーん</text:p>
          </table:table-cell>
          <table:table-cell table:style-name="ce11" office:value-type="string" calcext:value-type="string">
            <text:p>第５弾ブースターパック</text:p>
          </table:table-cell>
          <table:table-cell table:style-name="ce11" table:formula="of:=VLOOKUP([.H485];[$収録番号.$A$1:$収録番号.$B$10];2;0)" office:value-type="float" office:value="55" calcext:value-type="float">
            <text:p>55</text:p>
          </table:table-cell>
          <table:table-cell office:value-type="string" calcext:value-type="string">
            <text:p>N</text:p>
          </table:table-cell>
          <table:table-cell table:style-name="ce11" table:formula="of:=VLOOKUP([.J485];[$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485];[$種類番号.$A$1:$種類番号.$B$4];2;0)" office:value-type="float" office:value="4" calcext:value-type="float">
            <text:p>4</text:p>
          </table:table-cell>
          <table:table-cell office:value-type="string" calcext:value-type="string">
            <text:p>黄</text:p>
          </table:table-cell>
          <table:table-cell table:style-name="ce11" table:formula="of:=VLOOKUP([.N485];[$色番号.$A$1:$色番号.$B$10];2;0)" office:value-type="float" office:value="8" calcext:value-type="float">
            <text:p>8</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85];[$特性番号.$A$1:$特性番号.$B$8];2;0);0)" office:value-type="float" office:value="0" calcext:value-type="float">
            <text:p>0</text:p>
          </table:table-cell>
          <table:table-cell office:value-type="string" calcext:value-type="string">
            <text:p>※ デッキに何枚でも入れてよい。</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85];[$遺業能力番号.$A$1:$遺業能力番号.$B$9];2;0);0)" office:value-type="float" office:value="3" calcext:value-type="float">
            <text:p>3</text:p>
          </table:table-cell>
          <table:table-cell table:style-name="ce28" office:value-type="boolean" office:boolean-value="true" calcext:value-type="boolean">
            <text:p>TRUE</text:p>
          </table:table-cell>
          <table:table-cell office:value-type="string" calcext:value-type="string">
            <text:p>https://one-draw.jp/ijinden/cardlist/005/card/05_094.png</text:p>
          </table:table-cell>
          <table:table-cell table:style-name="ce11" table:formula="of:=CONCATENATE([$JSON.$A$1];[.$C485];[$JSON.$B$1];[.$E485];[$JSON.$C$1];[.F485];[$JSON.$D$1];[.$G485];[$JSON.$E$1];IF(ISNA([.$T485]);&quot;null&quot;;&quot;&quot;&quot;&quot;&amp;[.$T485]&amp;&quot;&quot;&quot;&quot;);[$JSON.$F$1];[.$V485];[$JSON.$G$1];IF(ISNA([.$X485]);&quot;null&quot;;&quot;&quot;&quot;&quot;&amp;[.$X485]&amp;&quot;&quot;&quot;&quot;);[$JSON.$H$1];[.$AA485];[$JSON.$I$1];[.$I485];[$JSON.$J$1];[.K485];[$JSON.$K$1];[.$M485];[$JSON.$L$1];[.$P485];[$JSON.$M$1];[.$O485];[$JSON.$N$1];[.$S485];[$JSON.$O$1];[.$U485];[$JSON.$P$1];IF(ISNA([.$W485]);&quot;null&quot;;[.$W485]);[$JSON.$Q$1];[.$Y485];[$JSON.$R$1];IF([.$Z485];&quot;true&quot;;&quot;false&quot;);[$JSON.$S$1];[.$A485];[$JSON.$T$1];[.$B485];[$JSON.$U$1])" office:value-type="string" office:string-value="{&quot;id&quot;:&quot;2nd1-94&quot;,&quot;name&quot;:&quot;イエローストーン&quot;,&quot;displayName&quot;:&quot;イエローストーン (第5弾)&quot;,&quot;kana&quot;:&quot;いえろーすとーん&quot;,&quot;traitText&quot;:null,&quot;ruleText&quot;:&quot;※ デッキに何枚でも入れてよい。&quot;,&quot;legacyText&quot;:&quot;復元&quot;,&quot;imageUrl&quot;:&quot;https://one-draw.jp/ijinden/cardlist/005/card/05_094.png&quot;,&quot;expansion&quot;:55,&quot;rarity&quot;:1,&quot;type&quot;:4,&quot;level&quot;:1,&quot;color&quot;:8,&quot;term&quot;:0,&quot;trait&quot;:0,&quot;power&quot;:null,&quot;legacy&quot;:3,&quot;anyNumCopies&quot;:true,&quot;orderTable&quot;:484,&quot;orderDeck&quot;:461}," calcext:value-type="string">
            <text:p>{"id":"2nd1-94","name":"イエローストーン","displayName":"イエローストーン (第5弾)","kana":"いえろーすとーん","traitText":null,"ruleText":"※ デッキに何枚でも入れてよい。","legacyText":"復元","imageUrl":"https://one-draw.jp/ijinden/cardlist/005/card/05_094.png","expansion":55,"rarity":1,"type":4,"level":1,"color":8,"term":0,"trait":0,"power":null,"legacy":3,"anyNumCopies":true,"orderTable":484,"orderDeck":461},</text:p>
          </table:table-cell>
          <table:table-cell table:number-columns-repeated="16356"/>
        </table:table-row>
        <table:table-row table:style-name="ro2">
          <table:table-cell table:style-name="ce11" office:value-type="float" office:value="485" calcext:value-type="float">
            <text:p>485</text:p>
          </table:table-cell>
          <table:table-cell table:style-name="ce11" office:value-type="float" office:value="468" calcext:value-type="float">
            <text:p>468</text:p>
          </table:table-cell>
          <table:table-cell table:formula="of:=CONCATENATE(&quot;2nd1-&quot;;TEXT([.D486];&quot;0&quot;))" office:value-type="string" office:string-value="2nd1-95" calcext:value-type="string">
            <text:p>2nd1-95</text:p>
          </table:table-cell>
          <table:table-cell office:value-type="float" office:value="95" calcext:value-type="float">
            <text:p>95</text:p>
          </table:table-cell>
          <table:table-cell office:value-type="string" calcext:value-type="string">
            <text:p>パープルストーン</text:p>
          </table:table-cell>
          <table:table-cell office:value-type="string" calcext:value-type="string">
            <text:p>パープルストーン (第5弾)</text:p>
          </table:table-cell>
          <table:table-cell office:value-type="string" calcext:value-type="string">
            <text:p>ぱーぷるすとーん</text:p>
          </table:table-cell>
          <table:table-cell table:style-name="ce11" office:value-type="string" calcext:value-type="string">
            <text:p>第５弾ブースターパック</text:p>
          </table:table-cell>
          <table:table-cell table:style-name="ce11" table:formula="of:=VLOOKUP([.H486];[$収録番号.$A$1:$収録番号.$B$10];2;0)" office:value-type="float" office:value="55" calcext:value-type="float">
            <text:p>55</text:p>
          </table:table-cell>
          <table:table-cell office:value-type="string" calcext:value-type="string">
            <text:p>N</text:p>
          </table:table-cell>
          <table:table-cell table:style-name="ce11" table:formula="of:=VLOOKUP([.J486];[$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486];[$種類番号.$A$1:$種類番号.$B$4];2;0)" office:value-type="float" office:value="4" calcext:value-type="float">
            <text:p>4</text:p>
          </table:table-cell>
          <table:table-cell office:value-type="string" calcext:value-type="string">
            <text:p>紫</text:p>
          </table:table-cell>
          <table:table-cell table:style-name="ce11" table:formula="of:=VLOOKUP([.N486];[$色番号.$A$1:$色番号.$B$10];2;0)" office:value-type="float" office:value="16" calcext:value-type="float">
            <text:p>16</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86];[$特性番号.$A$1:$特性番号.$B$8];2;0);0)" office:value-type="float" office:value="0" calcext:value-type="float">
            <text:p>0</text:p>
          </table:table-cell>
          <table:table-cell office:value-type="string" calcext:value-type="string">
            <text:p>※ デッキに何枚でも入れてよい。</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86];[$遺業能力番号.$A$1:$遺業能力番号.$B$9];2;0);0)" office:value-type="float" office:value="3" calcext:value-type="float">
            <text:p>3</text:p>
          </table:table-cell>
          <table:table-cell table:style-name="ce28" office:value-type="boolean" office:boolean-value="true" calcext:value-type="boolean">
            <text:p>TRUE</text:p>
          </table:table-cell>
          <table:table-cell office:value-type="string" calcext:value-type="string">
            <text:p>https://one-draw.jp/ijinden/cardlist/005/card/05_095.png</text:p>
          </table:table-cell>
          <table:table-cell table:style-name="ce11" table:formula="of:=CONCATENATE([$JSON.$A$1];[.$C486];[$JSON.$B$1];[.$E486];[$JSON.$C$1];[.F486];[$JSON.$D$1];[.$G486];[$JSON.$E$1];IF(ISNA([.$T486]);&quot;null&quot;;&quot;&quot;&quot;&quot;&amp;[.$T486]&amp;&quot;&quot;&quot;&quot;);[$JSON.$F$1];[.$V486];[$JSON.$G$1];IF(ISNA([.$X486]);&quot;null&quot;;&quot;&quot;&quot;&quot;&amp;[.$X486]&amp;&quot;&quot;&quot;&quot;);[$JSON.$H$1];[.$AA486];[$JSON.$I$1];[.$I486];[$JSON.$J$1];[.K486];[$JSON.$K$1];[.$M486];[$JSON.$L$1];[.$P486];[$JSON.$M$1];[.$O486];[$JSON.$N$1];[.$S486];[$JSON.$O$1];[.$U486];[$JSON.$P$1];IF(ISNA([.$W486]);&quot;null&quot;;[.$W486]);[$JSON.$Q$1];[.$Y486];[$JSON.$R$1];IF([.$Z486];&quot;true&quot;;&quot;false&quot;);[$JSON.$S$1];[.$A486];[$JSON.$T$1];[.$B486];[$JSON.$U$1])" office:value-type="string" office:string-value="{&quot;id&quot;:&quot;2nd1-95&quot;,&quot;name&quot;:&quot;パープルストーン&quot;,&quot;displayName&quot;:&quot;パープルストーン (第5弾)&quot;,&quot;kana&quot;:&quot;ぱーぷるすとーん&quot;,&quot;traitText&quot;:null,&quot;ruleText&quot;:&quot;※ デッキに何枚でも入れてよい。&quot;,&quot;legacyText&quot;:&quot;復元&quot;,&quot;imageUrl&quot;:&quot;https://one-draw.jp/ijinden/cardlist/005/card/05_095.png&quot;,&quot;expansion&quot;:55,&quot;rarity&quot;:1,&quot;type&quot;:4,&quot;level&quot;:1,&quot;color&quot;:16,&quot;term&quot;:0,&quot;trait&quot;:0,&quot;power&quot;:null,&quot;legacy&quot;:3,&quot;anyNumCopies&quot;:true,&quot;orderTable&quot;:485,&quot;orderDeck&quot;:468}," calcext:value-type="string">
            <text:p>{"id":"2nd1-95","name":"パープルストーン","displayName":"パープルストーン (第5弾)","kana":"ぱーぷるすとーん","traitText":null,"ruleText":"※ デッキに何枚でも入れてよい。","legacyText":"復元","imageUrl":"https://one-draw.jp/ijinden/cardlist/005/card/05_095.png","expansion":55,"rarity":1,"type":4,"level":1,"color":16,"term":0,"trait":0,"power":null,"legacy":3,"anyNumCopies":true,"orderTable":485,"orderDeck":468},</text:p>
          </table:table-cell>
          <table:table-cell table:number-columns-repeated="16356"/>
        </table:table-row>
        <table:table-row table:style-name="ro2">
          <table:table-cell table:style-name="ce11" office:value-type="float" office:value="486" calcext:value-type="float">
            <text:p>486</text:p>
          </table:table-cell>
          <table:table-cell table:style-name="ce11" office:value-type="float" office:value="479" calcext:value-type="float">
            <text:p>479</text:p>
          </table:table-cell>
          <table:table-cell table:formula="of:=CONCATENATE(&quot;2nd1-&quot;;TEXT([.D487];&quot;0&quot;))" office:value-type="string" office:string-value="2nd1-96" calcext:value-type="string">
            <text:p>2nd1-96</text:p>
          </table:table-cell>
          <table:table-cell office:value-type="float" office:value="96" calcext:value-type="float">
            <text:p>96</text:p>
          </table:table-cell>
          <table:table-cell office:value-type="string" calcext:value-type="string">
            <text:p>レッドオーブ</text:p>
          </table:table-cell>
          <table:table-cell office:value-type="string" calcext:value-type="string">
            <text:p>レッドオーブ (第5弾)</text:p>
          </table:table-cell>
          <table:table-cell office:value-type="string" calcext:value-type="string">
            <text:p>れっどおーぶ</text:p>
          </table:table-cell>
          <table:table-cell table:style-name="ce11" office:value-type="string" calcext:value-type="string">
            <text:p>第５弾ブースターパック</text:p>
          </table:table-cell>
          <table:table-cell table:style-name="ce11" table:formula="of:=VLOOKUP([.H487];[$収録番号.$A$1:$収録番号.$B$10];2;0)" office:value-type="float" office:value="55" calcext:value-type="float">
            <text:p>55</text:p>
          </table:table-cell>
          <table:table-cell office:value-type="string" calcext:value-type="string">
            <text:p>N</text:p>
          </table:table-cell>
          <table:table-cell table:style-name="ce11" table:formula="of:=VLOOKUP([.J487];[$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487];[$種類番号.$A$1:$種類番号.$B$4];2;0)" office:value-type="float" office:value="4" calcext:value-type="float">
            <text:p>4</text:p>
          </table:table-cell>
          <table:table-cell office:value-type="string" calcext:value-type="string">
            <text:p>赤</text:p>
          </table:table-cell>
          <table:table-cell table:style-name="ce11" table:formula="of:=VLOOKUP([.N487];[$色番号.$A$1:$色番号.$B$10];2;0)" office:value-type="float" office:value="1" calcext:value-type="float">
            <text:p>1</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87];[$特性番号.$A$1:$特性番号.$B$8];2;0);0)" office:value-type="float" office:value="0" calcext:value-type="float">
            <text:p>0</text:p>
          </table:table-cell>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87];[$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096.png</text:p>
          </table:table-cell>
          <table:table-cell table:style-name="ce11" table:formula="of:=CONCATENATE([$JSON.$A$1];[.$C487];[$JSON.$B$1];[.$E487];[$JSON.$C$1];[.F487];[$JSON.$D$1];[.$G487];[$JSON.$E$1];IF(ISNA([.$T487]);&quot;null&quot;;&quot;&quot;&quot;&quot;&amp;[.$T487]&amp;&quot;&quot;&quot;&quot;);[$JSON.$F$1];[.$V487];[$JSON.$G$1];IF(ISNA([.$X487]);&quot;null&quot;;&quot;&quot;&quot;&quot;&amp;[.$X487]&amp;&quot;&quot;&quot;&quot;);[$JSON.$H$1];[.$AA487];[$JSON.$I$1];[.$I487];[$JSON.$J$1];[.K487];[$JSON.$K$1];[.$M487];[$JSON.$L$1];[.$P487];[$JSON.$M$1];[.$O487];[$JSON.$N$1];[.$S487];[$JSON.$O$1];[.$U487];[$JSON.$P$1];IF(ISNA([.$W487]);&quot;null&quot;;[.$W487]);[$JSON.$Q$1];[.$Y487];[$JSON.$R$1];IF([.$Z487];&quot;true&quot;;&quot;false&quot;);[$JSON.$S$1];[.$A487];[$JSON.$T$1];[.$B487];[$JSON.$U$1])" office:value-type="string" office:string-value="{&quot;id&quot;:&quot;2nd1-96&quot;,&quot;name&quot;:&quot;レッドオーブ&quot;,&quot;displayName&quot;:&quot;レッドオーブ (第5弾)&quot;,&quot;kana&quot;:&quot;れっどおーぶ&quot;,&quot;traitText&quot;:null,&quot;ruleText&quot;:&quot;&quot;,&quot;legacyText&quot;:&quot;復元&quot;,&quot;imageUrl&quot;:&quot;https://one-draw.jp/ijinden/cardlist/005/card/05_096.png&quot;,&quot;expansion&quot;:55,&quot;rarity&quot;:1,&quot;type&quot;:4,&quot;level&quot;:2,&quot;color&quot;:1,&quot;term&quot;:0,&quot;trait&quot;:0,&quot;power&quot;:null,&quot;legacy&quot;:3,&quot;anyNumCopies&quot;:false,&quot;orderTable&quot;:486,&quot;orderDeck&quot;:479}," calcext:value-type="string">
            <text:p>{"id":"2nd1-96","name":"レッドオーブ","displayName":"レッドオーブ (第5弾)","kana":"れっどおーぶ","traitText":null,"ruleText":"","legacyText":"復元","imageUrl":"https://one-draw.jp/ijinden/cardlist/005/card/05_096.png","expansion":55,"rarity":1,"type":4,"level":2,"color":1,"term":0,"trait":0,"power":null,"legacy":3,"anyNumCopies":false,"orderTable":486,"orderDeck":479},</text:p>
          </table:table-cell>
          <table:table-cell table:number-columns-repeated="16356"/>
        </table:table-row>
        <table:table-row table:style-name="ro2">
          <table:table-cell table:style-name="ce11" office:value-type="float" office:value="487" calcext:value-type="float">
            <text:p>487</text:p>
          </table:table-cell>
          <table:table-cell table:style-name="ce11" office:value-type="float" office:value="481" calcext:value-type="float">
            <text:p>481</text:p>
          </table:table-cell>
          <table:table-cell table:formula="of:=CONCATENATE(&quot;2nd1-&quot;;TEXT([.D488];&quot;0&quot;))" office:value-type="string" office:string-value="2nd1-97" calcext:value-type="string">
            <text:p>2nd1-97</text:p>
          </table:table-cell>
          <table:table-cell office:value-type="float" office:value="97" calcext:value-type="float">
            <text:p>97</text:p>
          </table:table-cell>
          <table:table-cell office:value-type="string" calcext:value-type="string">
            <text:p>ブルーオーブ</text:p>
          </table:table-cell>
          <table:table-cell office:value-type="string" calcext:value-type="string">
            <text:p>ブルーオーブ (第5弾)</text:p>
          </table:table-cell>
          <table:table-cell office:value-type="string" calcext:value-type="string">
            <text:p>ぶるーおーぶ</text:p>
          </table:table-cell>
          <table:table-cell table:style-name="ce11" office:value-type="string" calcext:value-type="string">
            <text:p>第５弾ブースターパック</text:p>
          </table:table-cell>
          <table:table-cell table:style-name="ce11" table:formula="of:=VLOOKUP([.H488];[$収録番号.$A$1:$収録番号.$B$10];2;0)" office:value-type="float" office:value="55" calcext:value-type="float">
            <text:p>55</text:p>
          </table:table-cell>
          <table:table-cell office:value-type="string" calcext:value-type="string">
            <text:p>N</text:p>
          </table:table-cell>
          <table:table-cell table:style-name="ce11" table:formula="of:=VLOOKUP([.J488];[$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488];[$種類番号.$A$1:$種類番号.$B$4];2;0)" office:value-type="float" office:value="4" calcext:value-type="float">
            <text:p>4</text:p>
          </table:table-cell>
          <table:table-cell office:value-type="string" calcext:value-type="string">
            <text:p>青</text:p>
          </table:table-cell>
          <table:table-cell table:style-name="ce11" table:formula="of:=VLOOKUP([.N488];[$色番号.$A$1:$色番号.$B$10];2;0)" office:value-type="float" office:value="2" calcext:value-type="float">
            <text:p>2</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88];[$特性番号.$A$1:$特性番号.$B$8];2;0);0)" office:value-type="float" office:value="0" calcext:value-type="float">
            <text:p>0</text:p>
          </table:table-cell>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88];[$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097.png</text:p>
          </table:table-cell>
          <table:table-cell table:style-name="ce11" table:formula="of:=CONCATENATE([$JSON.$A$1];[.$C488];[$JSON.$B$1];[.$E488];[$JSON.$C$1];[.F488];[$JSON.$D$1];[.$G488];[$JSON.$E$1];IF(ISNA([.$T488]);&quot;null&quot;;&quot;&quot;&quot;&quot;&amp;[.$T488]&amp;&quot;&quot;&quot;&quot;);[$JSON.$F$1];[.$V488];[$JSON.$G$1];IF(ISNA([.$X488]);&quot;null&quot;;&quot;&quot;&quot;&quot;&amp;[.$X488]&amp;&quot;&quot;&quot;&quot;);[$JSON.$H$1];[.$AA488];[$JSON.$I$1];[.$I488];[$JSON.$J$1];[.K488];[$JSON.$K$1];[.$M488];[$JSON.$L$1];[.$P488];[$JSON.$M$1];[.$O488];[$JSON.$N$1];[.$S488];[$JSON.$O$1];[.$U488];[$JSON.$P$1];IF(ISNA([.$W488]);&quot;null&quot;;[.$W488]);[$JSON.$Q$1];[.$Y488];[$JSON.$R$1];IF([.$Z488];&quot;true&quot;;&quot;false&quot;);[$JSON.$S$1];[.$A488];[$JSON.$T$1];[.$B488];[$JSON.$U$1])" office:value-type="string" office:string-value="{&quot;id&quot;:&quot;2nd1-97&quot;,&quot;name&quot;:&quot;ブルーオーブ&quot;,&quot;displayName&quot;:&quot;ブルーオーブ (第5弾)&quot;,&quot;kana&quot;:&quot;ぶるーおーぶ&quot;,&quot;traitText&quot;:null,&quot;ruleText&quot;:&quot;&quot;,&quot;legacyText&quot;:&quot;復元&quot;,&quot;imageUrl&quot;:&quot;https://one-draw.jp/ijinden/cardlist/005/card/05_097.png&quot;,&quot;expansion&quot;:55,&quot;rarity&quot;:1,&quot;type&quot;:4,&quot;level&quot;:2,&quot;color&quot;:2,&quot;term&quot;:0,&quot;trait&quot;:0,&quot;power&quot;:null,&quot;legacy&quot;:3,&quot;anyNumCopies&quot;:false,&quot;orderTable&quot;:487,&quot;orderDeck&quot;:481}," calcext:value-type="string">
            <text:p>{"id":"2nd1-97","name":"ブルーオーブ","displayName":"ブルーオーブ (第5弾)","kana":"ぶるーおーぶ","traitText":null,"ruleText":"","legacyText":"復元","imageUrl":"https://one-draw.jp/ijinden/cardlist/005/card/05_097.png","expansion":55,"rarity":1,"type":4,"level":2,"color":2,"term":0,"trait":0,"power":null,"legacy":3,"anyNumCopies":false,"orderTable":487,"orderDeck":481},</text:p>
          </table:table-cell>
          <table:table-cell table:number-columns-repeated="16356"/>
        </table:table-row>
        <table:table-row table:style-name="ro2">
          <table:table-cell table:style-name="ce11" office:value-type="float" office:value="488" calcext:value-type="float">
            <text:p>488</text:p>
          </table:table-cell>
          <table:table-cell table:style-name="ce11" office:value-type="float" office:value="483" calcext:value-type="float">
            <text:p>483</text:p>
          </table:table-cell>
          <table:table-cell table:formula="of:=CONCATENATE(&quot;2nd1-&quot;;TEXT([.D489];&quot;0&quot;))" office:value-type="string" office:string-value="2nd1-98" calcext:value-type="string">
            <text:p>2nd1-98</text:p>
          </table:table-cell>
          <table:table-cell office:value-type="float" office:value="98" calcext:value-type="float">
            <text:p>98</text:p>
          </table:table-cell>
          <table:table-cell office:value-type="string" calcext:value-type="string">
            <text:p>グリーンオーブ</text:p>
          </table:table-cell>
          <table:table-cell office:value-type="string" calcext:value-type="string">
            <text:p>グリーンオーブ (第5弾)</text:p>
          </table:table-cell>
          <table:table-cell office:value-type="string" calcext:value-type="string">
            <text:p>ぐりーんおーぶ</text:p>
          </table:table-cell>
          <table:table-cell table:style-name="ce11" office:value-type="string" calcext:value-type="string">
            <text:p>第５弾ブースターパック</text:p>
          </table:table-cell>
          <table:table-cell table:style-name="ce11" table:formula="of:=VLOOKUP([.H489];[$収録番号.$A$1:$収録番号.$B$10];2;0)" office:value-type="float" office:value="55" calcext:value-type="float">
            <text:p>55</text:p>
          </table:table-cell>
          <table:table-cell office:value-type="string" calcext:value-type="string">
            <text:p>N</text:p>
          </table:table-cell>
          <table:table-cell table:style-name="ce11" table:formula="of:=VLOOKUP([.J489];[$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489];[$種類番号.$A$1:$種類番号.$B$4];2;0)" office:value-type="float" office:value="4" calcext:value-type="float">
            <text:p>4</text:p>
          </table:table-cell>
          <table:table-cell office:value-type="string" calcext:value-type="string">
            <text:p>緑</text:p>
          </table:table-cell>
          <table:table-cell table:style-name="ce11" table:formula="of:=VLOOKUP([.N489];[$色番号.$A$1:$色番号.$B$10];2;0)" office:value-type="float" office:value="4" calcext:value-type="float">
            <text:p>4</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8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89];[$特性番号.$A$1:$特性番号.$B$8];2;0);0)" office:value-type="float" office:value="0" calcext:value-type="float">
            <text:p>0</text:p>
          </table:table-cell>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89];[$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098.png</text:p>
          </table:table-cell>
          <table:table-cell table:style-name="ce11" table:formula="of:=CONCATENATE([$JSON.$A$1];[.$C489];[$JSON.$B$1];[.$E489];[$JSON.$C$1];[.F489];[$JSON.$D$1];[.$G489];[$JSON.$E$1];IF(ISNA([.$T489]);&quot;null&quot;;&quot;&quot;&quot;&quot;&amp;[.$T489]&amp;&quot;&quot;&quot;&quot;);[$JSON.$F$1];[.$V489];[$JSON.$G$1];IF(ISNA([.$X489]);&quot;null&quot;;&quot;&quot;&quot;&quot;&amp;[.$X489]&amp;&quot;&quot;&quot;&quot;);[$JSON.$H$1];[.$AA489];[$JSON.$I$1];[.$I489];[$JSON.$J$1];[.K489];[$JSON.$K$1];[.$M489];[$JSON.$L$1];[.$P489];[$JSON.$M$1];[.$O489];[$JSON.$N$1];[.$S489];[$JSON.$O$1];[.$U489];[$JSON.$P$1];IF(ISNA([.$W489]);&quot;null&quot;;[.$W489]);[$JSON.$Q$1];[.$Y489];[$JSON.$R$1];IF([.$Z489];&quot;true&quot;;&quot;false&quot;);[$JSON.$S$1];[.$A489];[$JSON.$T$1];[.$B489];[$JSON.$U$1])" office:value-type="string" office:string-value="{&quot;id&quot;:&quot;2nd1-98&quot;,&quot;name&quot;:&quot;グリーンオーブ&quot;,&quot;displayName&quot;:&quot;グリーンオーブ (第5弾)&quot;,&quot;kana&quot;:&quot;ぐりーんおーぶ&quot;,&quot;traitText&quot;:null,&quot;ruleText&quot;:&quot;&quot;,&quot;legacyText&quot;:&quot;復元&quot;,&quot;imageUrl&quot;:&quot;https://one-draw.jp/ijinden/cardlist/005/card/05_098.png&quot;,&quot;expansion&quot;:55,&quot;rarity&quot;:1,&quot;type&quot;:4,&quot;level&quot;:2,&quot;color&quot;:4,&quot;term&quot;:0,&quot;trait&quot;:0,&quot;power&quot;:null,&quot;legacy&quot;:3,&quot;anyNumCopies&quot;:false,&quot;orderTable&quot;:488,&quot;orderDeck&quot;:483}," calcext:value-type="string">
            <text:p>{"id":"2nd1-98","name":"グリーンオーブ","displayName":"グリーンオーブ (第5弾)","kana":"ぐりーんおーぶ","traitText":null,"ruleText":"","legacyText":"復元","imageUrl":"https://one-draw.jp/ijinden/cardlist/005/card/05_098.png","expansion":55,"rarity":1,"type":4,"level":2,"color":4,"term":0,"trait":0,"power":null,"legacy":3,"anyNumCopies":false,"orderTable":488,"orderDeck":483},</text:p>
          </table:table-cell>
          <table:table-cell table:number-columns-repeated="16356"/>
        </table:table-row>
        <table:table-row table:style-name="ro2">
          <table:table-cell table:style-name="ce11" office:value-type="float" office:value="489" calcext:value-type="float">
            <text:p>489</text:p>
          </table:table-cell>
          <table:table-cell table:style-name="ce11" office:value-type="float" office:value="485" calcext:value-type="float">
            <text:p>485</text:p>
          </table:table-cell>
          <table:table-cell table:formula="of:=CONCATENATE(&quot;2nd1-&quot;;TEXT([.D490];&quot;0&quot;))" office:value-type="string" office:string-value="2nd1-99" calcext:value-type="string">
            <text:p>2nd1-99</text:p>
          </table:table-cell>
          <table:table-cell office:value-type="float" office:value="99" calcext:value-type="float">
            <text:p>99</text:p>
          </table:table-cell>
          <table:table-cell office:value-type="string" calcext:value-type="string">
            <text:p>イエローオーブ</text:p>
          </table:table-cell>
          <table:table-cell office:value-type="string" calcext:value-type="string">
            <text:p>イエローオーブ (第5弾)</text:p>
          </table:table-cell>
          <table:table-cell office:value-type="string" calcext:value-type="string">
            <text:p>いえろーおーぶ</text:p>
          </table:table-cell>
          <table:table-cell table:style-name="ce11" office:value-type="string" calcext:value-type="string">
            <text:p>第５弾ブースターパック</text:p>
          </table:table-cell>
          <table:table-cell table:style-name="ce11" table:formula="of:=VLOOKUP([.H490];[$収録番号.$A$1:$収録番号.$B$10];2;0)" office:value-type="float" office:value="55" calcext:value-type="float">
            <text:p>55</text:p>
          </table:table-cell>
          <table:table-cell office:value-type="string" calcext:value-type="string">
            <text:p>N</text:p>
          </table:table-cell>
          <table:table-cell table:style-name="ce11" table:formula="of:=VLOOKUP([.J490];[$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490];[$種類番号.$A$1:$種類番号.$B$4];2;0)" office:value-type="float" office:value="4" calcext:value-type="float">
            <text:p>4</text:p>
          </table:table-cell>
          <table:table-cell office:value-type="string" calcext:value-type="string">
            <text:p>黄</text:p>
          </table:table-cell>
          <table:table-cell table:style-name="ce11" table:formula="of:=VLOOKUP([.N490];[$色番号.$A$1:$色番号.$B$10];2;0)" office:value-type="float" office:value="8" calcext:value-type="float">
            <text:p>8</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9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90];[$特性番号.$A$1:$特性番号.$B$8];2;0);0)" office:value-type="float" office:value="0" calcext:value-type="float">
            <text:p>0</text:p>
          </table:table-cell>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90];[$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099.png</text:p>
          </table:table-cell>
          <table:table-cell table:style-name="ce11" table:formula="of:=CONCATENATE([$JSON.$A$1];[.$C490];[$JSON.$B$1];[.$E490];[$JSON.$C$1];[.F490];[$JSON.$D$1];[.$G490];[$JSON.$E$1];IF(ISNA([.$T490]);&quot;null&quot;;&quot;&quot;&quot;&quot;&amp;[.$T490]&amp;&quot;&quot;&quot;&quot;);[$JSON.$F$1];[.$V490];[$JSON.$G$1];IF(ISNA([.$X490]);&quot;null&quot;;&quot;&quot;&quot;&quot;&amp;[.$X490]&amp;&quot;&quot;&quot;&quot;);[$JSON.$H$1];[.$AA490];[$JSON.$I$1];[.$I490];[$JSON.$J$1];[.K490];[$JSON.$K$1];[.$M490];[$JSON.$L$1];[.$P490];[$JSON.$M$1];[.$O490];[$JSON.$N$1];[.$S490];[$JSON.$O$1];[.$U490];[$JSON.$P$1];IF(ISNA([.$W490]);&quot;null&quot;;[.$W490]);[$JSON.$Q$1];[.$Y490];[$JSON.$R$1];IF([.$Z490];&quot;true&quot;;&quot;false&quot;);[$JSON.$S$1];[.$A490];[$JSON.$T$1];[.$B490];[$JSON.$U$1])" office:value-type="string" office:string-value="{&quot;id&quot;:&quot;2nd1-99&quot;,&quot;name&quot;:&quot;イエローオーブ&quot;,&quot;displayName&quot;:&quot;イエローオーブ (第5弾)&quot;,&quot;kana&quot;:&quot;いえろーおーぶ&quot;,&quot;traitText&quot;:null,&quot;ruleText&quot;:&quot;&quot;,&quot;legacyText&quot;:&quot;復元&quot;,&quot;imageUrl&quot;:&quot;https://one-draw.jp/ijinden/cardlist/005/card/05_099.png&quot;,&quot;expansion&quot;:55,&quot;rarity&quot;:1,&quot;type&quot;:4,&quot;level&quot;:2,&quot;color&quot;:8,&quot;term&quot;:0,&quot;trait&quot;:0,&quot;power&quot;:null,&quot;legacy&quot;:3,&quot;anyNumCopies&quot;:false,&quot;orderTable&quot;:489,&quot;orderDeck&quot;:485}," calcext:value-type="string">
            <text:p>{"id":"2nd1-99","name":"イエローオーブ","displayName":"イエローオーブ (第5弾)","kana":"いえろーおーぶ","traitText":null,"ruleText":"","legacyText":"復元","imageUrl":"https://one-draw.jp/ijinden/cardlist/005/card/05_099.png","expansion":55,"rarity":1,"type":4,"level":2,"color":8,"term":0,"trait":0,"power":null,"legacy":3,"anyNumCopies":false,"orderTable":489,"orderDeck":485},</text:p>
          </table:table-cell>
          <table:table-cell table:number-columns-repeated="16356"/>
        </table:table-row>
        <table:table-row table:style-name="ro2">
          <table:table-cell table:style-name="ce11" office:value-type="float" office:value="490" calcext:value-type="float">
            <text:p>490</text:p>
          </table:table-cell>
          <table:table-cell table:style-name="ce11" office:value-type="float" office:value="487" calcext:value-type="float">
            <text:p>487</text:p>
          </table:table-cell>
          <table:table-cell table:formula="of:=CONCATENATE(&quot;2nd1-&quot;;TEXT([.D491];&quot;0&quot;))" office:value-type="string" office:string-value="2nd1-100" calcext:value-type="string">
            <text:p>2nd1-100</text:p>
          </table:table-cell>
          <table:table-cell office:value-type="float" office:value="100" calcext:value-type="float">
            <text:p>100</text:p>
          </table:table-cell>
          <table:table-cell office:value-type="string" calcext:value-type="string">
            <text:p>パープルオーブ</text:p>
          </table:table-cell>
          <table:table-cell office:value-type="string" calcext:value-type="string">
            <text:p>パープルオーブ (第5弾)</text:p>
          </table:table-cell>
          <table:table-cell office:value-type="string" calcext:value-type="string">
            <text:p>ぱーぷるおーぶ</text:p>
          </table:table-cell>
          <table:table-cell table:style-name="ce11" office:value-type="string" calcext:value-type="string">
            <text:p>第５弾ブースターパック</text:p>
          </table:table-cell>
          <table:table-cell table:style-name="ce11" table:formula="of:=VLOOKUP([.H491];[$収録番号.$A$1:$収録番号.$B$10];2;0)" office:value-type="float" office:value="55" calcext:value-type="float">
            <text:p>55</text:p>
          </table:table-cell>
          <table:table-cell office:value-type="string" calcext:value-type="string">
            <text:p>N</text:p>
          </table:table-cell>
          <table:table-cell table:style-name="ce11" table:formula="of:=VLOOKUP([.J491];[$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491];[$種類番号.$A$1:$種類番号.$B$4];2;0)" office:value-type="float" office:value="4" calcext:value-type="float">
            <text:p>4</text:p>
          </table:table-cell>
          <table:table-cell office:value-type="string" calcext:value-type="string">
            <text:p>紫</text:p>
          </table:table-cell>
          <table:table-cell table:style-name="ce11" table:formula="of:=VLOOKUP([.N491];[$色番号.$A$1:$色番号.$B$10];2;0)" office:value-type="float" office:value="16" calcext:value-type="float">
            <text:p>16</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9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91];[$特性番号.$A$1:$特性番号.$B$8];2;0);0)" office:value-type="float" office:value="0" calcext:value-type="float">
            <text:p>0</text:p>
          </table:table-cell>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91];[$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100.png</text:p>
          </table:table-cell>
          <table:table-cell table:style-name="ce11" table:formula="of:=CONCATENATE([$JSON.$A$1];[.$C491];[$JSON.$B$1];[.$E491];[$JSON.$C$1];[.F491];[$JSON.$D$1];[.$G491];[$JSON.$E$1];IF(ISNA([.$T491]);&quot;null&quot;;&quot;&quot;&quot;&quot;&amp;[.$T491]&amp;&quot;&quot;&quot;&quot;);[$JSON.$F$1];[.$V491];[$JSON.$G$1];IF(ISNA([.$X491]);&quot;null&quot;;&quot;&quot;&quot;&quot;&amp;[.$X491]&amp;&quot;&quot;&quot;&quot;);[$JSON.$H$1];[.$AA491];[$JSON.$I$1];[.$I491];[$JSON.$J$1];[.K491];[$JSON.$K$1];[.$M491];[$JSON.$L$1];[.$P491];[$JSON.$M$1];[.$O491];[$JSON.$N$1];[.$S491];[$JSON.$O$1];[.$U491];[$JSON.$P$1];IF(ISNA([.$W491]);&quot;null&quot;;[.$W491]);[$JSON.$Q$1];[.$Y491];[$JSON.$R$1];IF([.$Z491];&quot;true&quot;;&quot;false&quot;);[$JSON.$S$1];[.$A491];[$JSON.$T$1];[.$B491];[$JSON.$U$1])" office:value-type="string" office:string-value="{&quot;id&quot;:&quot;2nd1-100&quot;,&quot;name&quot;:&quot;パープルオーブ&quot;,&quot;displayName&quot;:&quot;パープルオーブ (第5弾)&quot;,&quot;kana&quot;:&quot;ぱーぷるおーぶ&quot;,&quot;traitText&quot;:null,&quot;ruleText&quot;:&quot;&quot;,&quot;legacyText&quot;:&quot;復元&quot;,&quot;imageUrl&quot;:&quot;https://one-draw.jp/ijinden/cardlist/005/card/05_100.png&quot;,&quot;expansion&quot;:55,&quot;rarity&quot;:1,&quot;type&quot;:4,&quot;level&quot;:2,&quot;color&quot;:16,&quot;term&quot;:0,&quot;trait&quot;:0,&quot;power&quot;:null,&quot;legacy&quot;:3,&quot;anyNumCopies&quot;:false,&quot;orderTable&quot;:490,&quot;orderDeck&quot;:487}," calcext:value-type="string">
            <text:p>{"id":"2nd1-100","name":"パープルオーブ","displayName":"パープルオーブ (第5弾)","kana":"ぱーぷるおーぶ","traitText":null,"ruleText":"","legacyText":"復元","imageUrl":"https://one-draw.jp/ijinden/cardlist/005/card/05_100.png","expansion":55,"rarity":1,"type":4,"level":2,"color":16,"term":0,"trait":0,"power":null,"legacy":3,"anyNumCopies":false,"orderTable":490,"orderDeck":487},</text:p>
          </table:table-cell>
          <table:table-cell table:number-columns-repeated="16356"/>
        </table:table-row>
        <table:table-row table:style-name="ro2">
          <table:table-cell table:style-name="ce11" office:value-type="float" office:value="491" calcext:value-type="float">
            <text:p>491</text:p>
          </table:table-cell>
          <table:table-cell table:style-name="ce11" office:value-type="float" office:value="496" calcext:value-type="float">
            <text:p>496</text:p>
          </table:table-cell>
          <table:table-cell table:formula="of:=CONCATENATE(&quot;2nd1-&quot;;TEXT([.D492];&quot;0&quot;))" office:value-type="string" office:string-value="2nd1-101" calcext:value-type="string">
            <text:p>2nd1-101</text:p>
          </table:table-cell>
          <table:table-cell office:value-type="float" office:value="101" calcext:value-type="float">
            <text:p>101</text:p>
          </table:table-cell>
          <table:table-cell office:value-type="string" calcext:value-type="string">
            <text:p>熒惑のピラー</text:p>
          </table:table-cell>
          <table:table-cell table:style-name="ce11" table:formula="of:=[.E492]" office:value-type="string" office:string-value="熒惑のピラー" calcext:value-type="string">
            <text:p>熒惑のピラー</text:p>
          </table:table-cell>
          <table:table-cell office:value-type="string" calcext:value-type="string">
            <text:p>けいこくのぴらー</text:p>
          </table:table-cell>
          <table:table-cell table:style-name="ce11" office:value-type="string" calcext:value-type="string">
            <text:p>第５弾ブースターパック</text:p>
          </table:table-cell>
          <table:table-cell table:style-name="ce11" table:formula="of:=VLOOKUP([.H492];[$収録番号.$A$1:$収録番号.$B$10];2;0)" office:value-type="float" office:value="55" calcext:value-type="float">
            <text:p>55</text:p>
          </table:table-cell>
          <table:table-cell office:value-type="string" calcext:value-type="string">
            <text:p>R</text:p>
          </table:table-cell>
          <table:table-cell table:style-name="ce11" table:formula="of:=VLOOKUP([.J492];[$レアリティ番号.$A$1:$レアリティ番号.$B$4];2;0)" office:value-type="float" office:value="2" calcext:value-type="float">
            <text:p>2</text:p>
          </table:table-cell>
          <table:table-cell office:value-type="string" calcext:value-type="string">
            <text:p>マリョク</text:p>
          </table:table-cell>
          <table:table-cell table:style-name="ce11" table:formula="of:=VLOOKUP([.L492];[$種類番号.$A$1:$種類番号.$B$4];2;0)" office:value-type="float" office:value="4" calcext:value-type="float">
            <text:p>4</text:p>
          </table:table-cell>
          <table:table-cell office:value-type="string" calcext:value-type="string">
            <text:p>赤</text:p>
          </table:table-cell>
          <table:table-cell table:style-name="ce11" table:formula="of:=VLOOKUP([.N492];[$色番号.$A$1:$色番号.$B$10];2;0)" office:value-type="float" office:value="1" calcext:value-type="float">
            <text:p>1</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9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92];[$特性番号.$A$1:$特性番号.$B$8];2;0);0)" office:value-type="float" office:value="0" calcext:value-type="float">
            <text:p>0</text:p>
          </table:table-cell>
          <table:table-cell office:value-type="string" calcext:value-type="string">
            <text:p>この能力は魔力ゾーンで効果を発揮する。自分と相手は、戦場と魔力ゾーンの能力を発動できない。自分はマホウ使用できない。¶消耗</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92];[$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101.png</text:p>
          </table:table-cell>
          <table:table-cell table:style-name="ce11" table:formula="of:=CONCATENATE([$JSON.$A$1];[.$C492];[$JSON.$B$1];[.$E492];[$JSON.$C$1];[.F492];[$JSON.$D$1];[.$G492];[$JSON.$E$1];IF(ISNA([.$T492]);&quot;null&quot;;&quot;&quot;&quot;&quot;&amp;[.$T492]&amp;&quot;&quot;&quot;&quot;);[$JSON.$F$1];[.$V492];[$JSON.$G$1];IF(ISNA([.$X492]);&quot;null&quot;;&quot;&quot;&quot;&quot;&amp;[.$X492]&amp;&quot;&quot;&quot;&quot;);[$JSON.$H$1];[.$AA492];[$JSON.$I$1];[.$I492];[$JSON.$J$1];[.K492];[$JSON.$K$1];[.$M492];[$JSON.$L$1];[.$P492];[$JSON.$M$1];[.$O492];[$JSON.$N$1];[.$S492];[$JSON.$O$1];[.$U492];[$JSON.$P$1];IF(ISNA([.$W492]);&quot;null&quot;;[.$W492]);[$JSON.$Q$1];[.$Y492];[$JSON.$R$1];IF([.$Z492];&quot;true&quot;;&quot;false&quot;);[$JSON.$S$1];[.$A492];[$JSON.$T$1];[.$B492];[$JSON.$U$1])" office:value-type="string" office:string-value="{&quot;id&quot;:&quot;2nd1-101&quot;,&quot;name&quot;:&quot;熒惑のピラー&quot;,&quot;displayName&quot;:&quot;熒惑のピラー&quot;,&quot;kana&quot;:&quot;けいこくのぴらー&quot;,&quot;traitText&quot;:null,&quot;ruleText&quot;:&quot;この能力は魔力ゾーンで効果を発揮する。自分と相手は、戦場と魔力ゾーンの能力を発動できない。自分はマホウ使用できない。¶消耗&quot;,&quot;legacyText&quot;:&quot;復元&quot;,&quot;imageUrl&quot;:&quot;https://one-draw.jp/ijinden/cardlist/005/card/05_101.png&quot;,&quot;expansion&quot;:55,&quot;rarity&quot;:2,&quot;type&quot;:4,&quot;level&quot;:3,&quot;color&quot;:1,&quot;term&quot;:0,&quot;trait&quot;:0,&quot;power&quot;:null,&quot;legacy&quot;:3,&quot;anyNumCopies&quot;:false,&quot;orderTable&quot;:491,&quot;orderDeck&quot;:496}," calcext:value-type="string">
            <text:p>{"id":"2nd1-101","name":"熒惑のピラー","displayName":"熒惑のピラー","kana":"けいこくのぴらー","traitText":null,"ruleText":"この能力は魔力ゾーンで効果を発揮する。自分と相手は、戦場と魔力ゾーンの能力を発動できない。自分はマホウ使用できない。¶消耗","legacyText":"復元","imageUrl":"https://one-draw.jp/ijinden/cardlist/005/card/05_101.png","expansion":55,"rarity":2,"type":4,"level":3,"color":1,"term":0,"trait":0,"power":null,"legacy":3,"anyNumCopies":false,"orderTable":491,"orderDeck":496},</text:p>
          </table:table-cell>
          <table:table-cell table:number-columns-repeated="16356"/>
        </table:table-row>
        <table:table-row table:style-name="ro2">
          <table:table-cell table:style-name="ce11" office:value-type="float" office:value="492" calcext:value-type="float">
            <text:p>492</text:p>
          </table:table-cell>
          <table:table-cell table:style-name="ce11" office:value-type="float" office:value="497" calcext:value-type="float">
            <text:p>497</text:p>
          </table:table-cell>
          <table:table-cell table:formula="of:=CONCATENATE(&quot;2nd1-&quot;;TEXT([.D493];&quot;0&quot;))" office:value-type="string" office:string-value="2nd1-102" calcext:value-type="string">
            <text:p>2nd1-102</text:p>
          </table:table-cell>
          <table:table-cell office:value-type="float" office:value="102" calcext:value-type="float">
            <text:p>102</text:p>
          </table:table-cell>
          <table:table-cell office:value-type="string" calcext:value-type="string">
            <text:p>辰星のピラー</text:p>
          </table:table-cell>
          <table:table-cell table:style-name="ce11" table:formula="of:=[.E493]" office:value-type="string" office:string-value="辰星のピラー" calcext:value-type="string">
            <text:p>辰星のピラー</text:p>
          </table:table-cell>
          <table:table-cell office:value-type="string" calcext:value-type="string">
            <text:p>しんせいのぴらー</text:p>
          </table:table-cell>
          <table:table-cell table:style-name="ce11" office:value-type="string" calcext:value-type="string">
            <text:p>第５弾ブースターパック</text:p>
          </table:table-cell>
          <table:table-cell table:style-name="ce11" table:formula="of:=VLOOKUP([.H493];[$収録番号.$A$1:$収録番号.$B$10];2;0)" office:value-type="float" office:value="55" calcext:value-type="float">
            <text:p>55</text:p>
          </table:table-cell>
          <table:table-cell office:value-type="string" calcext:value-type="string">
            <text:p>R</text:p>
          </table:table-cell>
          <table:table-cell table:style-name="ce11" table:formula="of:=VLOOKUP([.J493];[$レアリティ番号.$A$1:$レアリティ番号.$B$4];2;0)" office:value-type="float" office:value="2" calcext:value-type="float">
            <text:p>2</text:p>
          </table:table-cell>
          <table:table-cell office:value-type="string" calcext:value-type="string">
            <text:p>マリョク</text:p>
          </table:table-cell>
          <table:table-cell table:style-name="ce11" table:formula="of:=VLOOKUP([.L493];[$種類番号.$A$1:$種類番号.$B$4];2;0)" office:value-type="float" office:value="4" calcext:value-type="float">
            <text:p>4</text:p>
          </table:table-cell>
          <table:table-cell office:value-type="string" calcext:value-type="string">
            <text:p>青</text:p>
          </table:table-cell>
          <table:table-cell table:style-name="ce11" table:formula="of:=VLOOKUP([.N493];[$色番号.$A$1:$色番号.$B$10];2;0)" office:value-type="float" office:value="2" calcext:value-type="float">
            <text:p>2</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93];[$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93];[$特性番号.$A$1:$特性番号.$B$8];2;0);0)" office:value-type="float" office:value="0" calcext:value-type="float">
            <text:p>0</text:p>
          </table:table-cell>
          <table:table-cell office:value-type="string" calcext:value-type="string">
            <text:p>この能力は魔力ゾーンで効果を発揮する。自分と相手は、戦場と魔力ゾーンの能力を発動できない。自分はマホウ使用できない。¶消耗</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93];[$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102.png</text:p>
          </table:table-cell>
          <table:table-cell table:style-name="ce11" table:formula="of:=CONCATENATE([$JSON.$A$1];[.$C493];[$JSON.$B$1];[.$E493];[$JSON.$C$1];[.F493];[$JSON.$D$1];[.$G493];[$JSON.$E$1];IF(ISNA([.$T493]);&quot;null&quot;;&quot;&quot;&quot;&quot;&amp;[.$T493]&amp;&quot;&quot;&quot;&quot;);[$JSON.$F$1];[.$V493];[$JSON.$G$1];IF(ISNA([.$X493]);&quot;null&quot;;&quot;&quot;&quot;&quot;&amp;[.$X493]&amp;&quot;&quot;&quot;&quot;);[$JSON.$H$1];[.$AA493];[$JSON.$I$1];[.$I493];[$JSON.$J$1];[.K493];[$JSON.$K$1];[.$M493];[$JSON.$L$1];[.$P493];[$JSON.$M$1];[.$O493];[$JSON.$N$1];[.$S493];[$JSON.$O$1];[.$U493];[$JSON.$P$1];IF(ISNA([.$W493]);&quot;null&quot;;[.$W493]);[$JSON.$Q$1];[.$Y493];[$JSON.$R$1];IF([.$Z493];&quot;true&quot;;&quot;false&quot;);[$JSON.$S$1];[.$A493];[$JSON.$T$1];[.$B493];[$JSON.$U$1])" office:value-type="string" office:string-value="{&quot;id&quot;:&quot;2nd1-102&quot;,&quot;name&quot;:&quot;辰星のピラー&quot;,&quot;displayName&quot;:&quot;辰星のピラー&quot;,&quot;kana&quot;:&quot;しんせいのぴらー&quot;,&quot;traitText&quot;:null,&quot;ruleText&quot;:&quot;この能力は魔力ゾーンで効果を発揮する。自分と相手は、戦場と魔力ゾーンの能力を発動できない。自分はマホウ使用できない。¶消耗&quot;,&quot;legacyText&quot;:&quot;復元&quot;,&quot;imageUrl&quot;:&quot;https://one-draw.jp/ijinden/cardlist/005/card/05_102.png&quot;,&quot;expansion&quot;:55,&quot;rarity&quot;:2,&quot;type&quot;:4,&quot;level&quot;:3,&quot;color&quot;:2,&quot;term&quot;:0,&quot;trait&quot;:0,&quot;power&quot;:null,&quot;legacy&quot;:3,&quot;anyNumCopies&quot;:false,&quot;orderTable&quot;:492,&quot;orderDeck&quot;:497}," calcext:value-type="string">
            <text:p>{"id":"2nd1-102","name":"辰星のピラー","displayName":"辰星のピラー","kana":"しんせいのぴらー","traitText":null,"ruleText":"この能力は魔力ゾーンで効果を発揮する。自分と相手は、戦場と魔力ゾーンの能力を発動できない。自分はマホウ使用できない。¶消耗","legacyText":"復元","imageUrl":"https://one-draw.jp/ijinden/cardlist/005/card/05_102.png","expansion":55,"rarity":2,"type":4,"level":3,"color":2,"term":0,"trait":0,"power":null,"legacy":3,"anyNumCopies":false,"orderTable":492,"orderDeck":497},</text:p>
          </table:table-cell>
          <table:table-cell table:number-columns-repeated="16356"/>
        </table:table-row>
        <table:table-row table:style-name="ro2">
          <table:table-cell table:style-name="ce11" office:value-type="float" office:value="493" calcext:value-type="float">
            <text:p>493</text:p>
          </table:table-cell>
          <table:table-cell table:style-name="ce11" office:value-type="float" office:value="498" calcext:value-type="float">
            <text:p>498</text:p>
          </table:table-cell>
          <table:table-cell table:formula="of:=CONCATENATE(&quot;2nd1-&quot;;TEXT([.D494];&quot;0&quot;))" office:value-type="string" office:string-value="2nd1-103" calcext:value-type="string">
            <text:p>2nd1-103</text:p>
          </table:table-cell>
          <table:table-cell office:value-type="float" office:value="103" calcext:value-type="float">
            <text:p>103</text:p>
          </table:table-cell>
          <table:table-cell office:value-type="string" calcext:value-type="string">
            <text:p>歳星のピラー</text:p>
          </table:table-cell>
          <table:table-cell table:style-name="ce11" table:formula="of:=[.E494]" office:value-type="string" office:string-value="歳星のピラー" calcext:value-type="string">
            <text:p>歳星のピラー</text:p>
          </table:table-cell>
          <table:table-cell office:value-type="string" calcext:value-type="string">
            <text:p>さいせいのぴらー</text:p>
          </table:table-cell>
          <table:table-cell table:style-name="ce11" office:value-type="string" calcext:value-type="string">
            <text:p>第５弾ブースターパック</text:p>
          </table:table-cell>
          <table:table-cell table:style-name="ce11" table:formula="of:=VLOOKUP([.H494];[$収録番号.$A$1:$収録番号.$B$10];2;0)" office:value-type="float" office:value="55" calcext:value-type="float">
            <text:p>55</text:p>
          </table:table-cell>
          <table:table-cell office:value-type="string" calcext:value-type="string">
            <text:p>R</text:p>
          </table:table-cell>
          <table:table-cell table:style-name="ce11" table:formula="of:=VLOOKUP([.J494];[$レアリティ番号.$A$1:$レアリティ番号.$B$4];2;0)" office:value-type="float" office:value="2" calcext:value-type="float">
            <text:p>2</text:p>
          </table:table-cell>
          <table:table-cell office:value-type="string" calcext:value-type="string">
            <text:p>マリョク</text:p>
          </table:table-cell>
          <table:table-cell table:style-name="ce11" table:formula="of:=VLOOKUP([.L494];[$種類番号.$A$1:$種類番号.$B$4];2;0)" office:value-type="float" office:value="4" calcext:value-type="float">
            <text:p>4</text:p>
          </table:table-cell>
          <table:table-cell office:value-type="string" calcext:value-type="string">
            <text:p>緑</text:p>
          </table:table-cell>
          <table:table-cell table:style-name="ce11" table:formula="of:=VLOOKUP([.N494];[$色番号.$A$1:$色番号.$B$10];2;0)" office:value-type="float" office:value="4" calcext:value-type="float">
            <text:p>4</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94];[$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94];[$特性番号.$A$1:$特性番号.$B$8];2;0);0)" office:value-type="float" office:value="0" calcext:value-type="float">
            <text:p>0</text:p>
          </table:table-cell>
          <table:table-cell office:value-type="string" calcext:value-type="string">
            <text:p>この能力は魔力ゾーンで効果を発揮する。自分と相手は、戦場と魔力ゾーンの能力を発動できない。自分はマホウ使用できない。¶消耗</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94];[$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103.png</text:p>
          </table:table-cell>
          <table:table-cell table:style-name="ce11" table:formula="of:=CONCATENATE([$JSON.$A$1];[.$C494];[$JSON.$B$1];[.$E494];[$JSON.$C$1];[.F494];[$JSON.$D$1];[.$G494];[$JSON.$E$1];IF(ISNA([.$T494]);&quot;null&quot;;&quot;&quot;&quot;&quot;&amp;[.$T494]&amp;&quot;&quot;&quot;&quot;);[$JSON.$F$1];[.$V494];[$JSON.$G$1];IF(ISNA([.$X494]);&quot;null&quot;;&quot;&quot;&quot;&quot;&amp;[.$X494]&amp;&quot;&quot;&quot;&quot;);[$JSON.$H$1];[.$AA494];[$JSON.$I$1];[.$I494];[$JSON.$J$1];[.K494];[$JSON.$K$1];[.$M494];[$JSON.$L$1];[.$P494];[$JSON.$M$1];[.$O494];[$JSON.$N$1];[.$S494];[$JSON.$O$1];[.$U494];[$JSON.$P$1];IF(ISNA([.$W494]);&quot;null&quot;;[.$W494]);[$JSON.$Q$1];[.$Y494];[$JSON.$R$1];IF([.$Z494];&quot;true&quot;;&quot;false&quot;);[$JSON.$S$1];[.$A494];[$JSON.$T$1];[.$B494];[$JSON.$U$1])" office:value-type="string" office:string-value="{&quot;id&quot;:&quot;2nd1-103&quot;,&quot;name&quot;:&quot;歳星のピラー&quot;,&quot;displayName&quot;:&quot;歳星のピラー&quot;,&quot;kana&quot;:&quot;さいせいのぴらー&quot;,&quot;traitText&quot;:null,&quot;ruleText&quot;:&quot;この能力は魔力ゾーンで効果を発揮する。自分と相手は、戦場と魔力ゾーンの能力を発動できない。自分はマホウ使用できない。¶消耗&quot;,&quot;legacyText&quot;:&quot;復元&quot;,&quot;imageUrl&quot;:&quot;https://one-draw.jp/ijinden/cardlist/005/card/05_103.png&quot;,&quot;expansion&quot;:55,&quot;rarity&quot;:2,&quot;type&quot;:4,&quot;level&quot;:3,&quot;color&quot;:4,&quot;term&quot;:0,&quot;trait&quot;:0,&quot;power&quot;:null,&quot;legacy&quot;:3,&quot;anyNumCopies&quot;:false,&quot;orderTable&quot;:493,&quot;orderDeck&quot;:498}," calcext:value-type="string">
            <text:p>{"id":"2nd1-103","name":"歳星のピラー","displayName":"歳星のピラー","kana":"さいせいのぴらー","traitText":null,"ruleText":"この能力は魔力ゾーンで効果を発揮する。自分と相手は、戦場と魔力ゾーンの能力を発動できない。自分はマホウ使用できない。¶消耗","legacyText":"復元","imageUrl":"https://one-draw.jp/ijinden/cardlist/005/card/05_103.png","expansion":55,"rarity":2,"type":4,"level":3,"color":4,"term":0,"trait":0,"power":null,"legacy":3,"anyNumCopies":false,"orderTable":493,"orderDeck":498},</text:p>
          </table:table-cell>
          <table:table-cell table:number-columns-repeated="16356"/>
        </table:table-row>
        <table:table-row table:style-name="ro2">
          <table:table-cell table:style-name="ce11" office:value-type="float" office:value="494" calcext:value-type="float">
            <text:p>494</text:p>
          </table:table-cell>
          <table:table-cell table:style-name="ce11" office:value-type="float" office:value="499" calcext:value-type="float">
            <text:p>499</text:p>
          </table:table-cell>
          <table:table-cell table:formula="of:=CONCATENATE(&quot;2nd1-&quot;;TEXT([.D495];&quot;0&quot;))" office:value-type="string" office:string-value="2nd1-104" calcext:value-type="string">
            <text:p>2nd1-104</text:p>
          </table:table-cell>
          <table:table-cell office:value-type="float" office:value="104" calcext:value-type="float">
            <text:p>104</text:p>
          </table:table-cell>
          <table:table-cell office:value-type="string" calcext:value-type="string">
            <text:p>鎮星のピラー</text:p>
          </table:table-cell>
          <table:table-cell table:style-name="ce11" table:formula="of:=[.E495]" office:value-type="string" office:string-value="鎮星のピラー" calcext:value-type="string">
            <text:p>鎮星のピラー</text:p>
          </table:table-cell>
          <table:table-cell office:value-type="string" calcext:value-type="string">
            <text:p>ちんせいのぴらー</text:p>
          </table:table-cell>
          <table:table-cell table:style-name="ce11" office:value-type="string" calcext:value-type="string">
            <text:p>第５弾ブースターパック</text:p>
          </table:table-cell>
          <table:table-cell table:style-name="ce11" table:formula="of:=VLOOKUP([.H495];[$収録番号.$A$1:$収録番号.$B$10];2;0)" office:value-type="float" office:value="55" calcext:value-type="float">
            <text:p>55</text:p>
          </table:table-cell>
          <table:table-cell office:value-type="string" calcext:value-type="string">
            <text:p>R</text:p>
          </table:table-cell>
          <table:table-cell table:style-name="ce11" table:formula="of:=VLOOKUP([.J495];[$レアリティ番号.$A$1:$レアリティ番号.$B$4];2;0)" office:value-type="float" office:value="2" calcext:value-type="float">
            <text:p>2</text:p>
          </table:table-cell>
          <table:table-cell office:value-type="string" calcext:value-type="string">
            <text:p>マリョク</text:p>
          </table:table-cell>
          <table:table-cell table:style-name="ce11" table:formula="of:=VLOOKUP([.L495];[$種類番号.$A$1:$種類番号.$B$4];2;0)" office:value-type="float" office:value="4" calcext:value-type="float">
            <text:p>4</text:p>
          </table:table-cell>
          <table:table-cell office:value-type="string" calcext:value-type="string">
            <text:p>黄</text:p>
          </table:table-cell>
          <table:table-cell table:style-name="ce11" table:formula="of:=VLOOKUP([.N495];[$色番号.$A$1:$色番号.$B$10];2;0)" office:value-type="float" office:value="8" calcext:value-type="float">
            <text:p>8</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95];[$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95];[$特性番号.$A$1:$特性番号.$B$8];2;0);0)" office:value-type="float" office:value="0" calcext:value-type="float">
            <text:p>0</text:p>
          </table:table-cell>
          <table:table-cell office:value-type="string" calcext:value-type="string">
            <text:p>この能力は魔力ゾーンで効果を発揮する。自分と相手は、戦場と魔力ゾーンの能力を発動できない。自分はマホウ使用できない。¶消耗</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95];[$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104.png</text:p>
          </table:table-cell>
          <table:table-cell table:style-name="ce11" table:formula="of:=CONCATENATE([$JSON.$A$1];[.$C495];[$JSON.$B$1];[.$E495];[$JSON.$C$1];[.F495];[$JSON.$D$1];[.$G495];[$JSON.$E$1];IF(ISNA([.$T495]);&quot;null&quot;;&quot;&quot;&quot;&quot;&amp;[.$T495]&amp;&quot;&quot;&quot;&quot;);[$JSON.$F$1];[.$V495];[$JSON.$G$1];IF(ISNA([.$X495]);&quot;null&quot;;&quot;&quot;&quot;&quot;&amp;[.$X495]&amp;&quot;&quot;&quot;&quot;);[$JSON.$H$1];[.$AA495];[$JSON.$I$1];[.$I495];[$JSON.$J$1];[.K495];[$JSON.$K$1];[.$M495];[$JSON.$L$1];[.$P495];[$JSON.$M$1];[.$O495];[$JSON.$N$1];[.$S495];[$JSON.$O$1];[.$U495];[$JSON.$P$1];IF(ISNA([.$W495]);&quot;null&quot;;[.$W495]);[$JSON.$Q$1];[.$Y495];[$JSON.$R$1];IF([.$Z495];&quot;true&quot;;&quot;false&quot;);[$JSON.$S$1];[.$A495];[$JSON.$T$1];[.$B495];[$JSON.$U$1])" office:value-type="string" office:string-value="{&quot;id&quot;:&quot;2nd1-104&quot;,&quot;name&quot;:&quot;鎮星のピラー&quot;,&quot;displayName&quot;:&quot;鎮星のピラー&quot;,&quot;kana&quot;:&quot;ちんせいのぴらー&quot;,&quot;traitText&quot;:null,&quot;ruleText&quot;:&quot;この能力は魔力ゾーンで効果を発揮する。自分と相手は、戦場と魔力ゾーンの能力を発動できない。自分はマホウ使用できない。¶消耗&quot;,&quot;legacyText&quot;:&quot;復元&quot;,&quot;imageUrl&quot;:&quot;https://one-draw.jp/ijinden/cardlist/005/card/05_104.png&quot;,&quot;expansion&quot;:55,&quot;rarity&quot;:2,&quot;type&quot;:4,&quot;level&quot;:3,&quot;color&quot;:8,&quot;term&quot;:0,&quot;trait&quot;:0,&quot;power&quot;:null,&quot;legacy&quot;:3,&quot;anyNumCopies&quot;:false,&quot;orderTable&quot;:494,&quot;orderDeck&quot;:499}," calcext:value-type="string">
            <text:p>{"id":"2nd1-104","name":"鎮星のピラー","displayName":"鎮星のピラー","kana":"ちんせいのぴらー","traitText":null,"ruleText":"この能力は魔力ゾーンで効果を発揮する。自分と相手は、戦場と魔力ゾーンの能力を発動できない。自分はマホウ使用できない。¶消耗","legacyText":"復元","imageUrl":"https://one-draw.jp/ijinden/cardlist/005/card/05_104.png","expansion":55,"rarity":2,"type":4,"level":3,"color":8,"term":0,"trait":0,"power":null,"legacy":3,"anyNumCopies":false,"orderTable":494,"orderDeck":499},</text:p>
          </table:table-cell>
          <table:table-cell table:number-columns-repeated="16356"/>
        </table:table-row>
        <table:table-row table:style-name="ro2">
          <table:table-cell table:style-name="ce11" office:value-type="float" office:value="495" calcext:value-type="float">
            <text:p>495</text:p>
          </table:table-cell>
          <table:table-cell table:style-name="ce11" office:value-type="float" office:value="500" calcext:value-type="float">
            <text:p>500</text:p>
          </table:table-cell>
          <table:table-cell table:formula="of:=CONCATENATE(&quot;2nd1-&quot;;TEXT([.D496];&quot;0&quot;))" office:value-type="string" office:string-value="2nd1-105" calcext:value-type="string">
            <text:p>2nd1-105</text:p>
          </table:table-cell>
          <table:table-cell office:value-type="float" office:value="105" calcext:value-type="float">
            <text:p>105</text:p>
          </table:table-cell>
          <table:table-cell office:value-type="string" calcext:value-type="string">
            <text:p>太白のピラー</text:p>
          </table:table-cell>
          <table:table-cell table:style-name="ce11" table:formula="of:=[.E496]" office:value-type="string" office:string-value="太白のピラー" calcext:value-type="string">
            <text:p>太白のピラー</text:p>
          </table:table-cell>
          <table:table-cell office:value-type="string" calcext:value-type="string">
            <text:p>たいはくのぴらー</text:p>
          </table:table-cell>
          <table:table-cell table:style-name="ce11" office:value-type="string" calcext:value-type="string">
            <text:p>第５弾ブースターパック</text:p>
          </table:table-cell>
          <table:table-cell table:style-name="ce11" table:formula="of:=VLOOKUP([.H496];[$収録番号.$A$1:$収録番号.$B$10];2;0)" office:value-type="float" office:value="55" calcext:value-type="float">
            <text:p>55</text:p>
          </table:table-cell>
          <table:table-cell office:value-type="string" calcext:value-type="string">
            <text:p>R</text:p>
          </table:table-cell>
          <table:table-cell table:style-name="ce11" table:formula="of:=VLOOKUP([.J496];[$レアリティ番号.$A$1:$レアリティ番号.$B$4];2;0)" office:value-type="float" office:value="2" calcext:value-type="float">
            <text:p>2</text:p>
          </table:table-cell>
          <table:table-cell office:value-type="string" calcext:value-type="string">
            <text:p>マリョク</text:p>
          </table:table-cell>
          <table:table-cell table:style-name="ce11" table:formula="of:=VLOOKUP([.L496];[$種類番号.$A$1:$種類番号.$B$4];2;0)" office:value-type="float" office:value="4" calcext:value-type="float">
            <text:p>4</text:p>
          </table:table-cell>
          <table:table-cell office:value-type="string" calcext:value-type="string">
            <text:p>紫</text:p>
          </table:table-cell>
          <table:table-cell table:style-name="ce11" table:formula="of:=VLOOKUP([.N496];[$色番号.$A$1:$色番号.$B$10];2;0)" office:value-type="float" office:value="16" calcext:value-type="float">
            <text:p>16</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96];[$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96];[$特性番号.$A$1:$特性番号.$B$8];2;0);0)" office:value-type="float" office:value="0" calcext:value-type="float">
            <text:p>0</text:p>
          </table:table-cell>
          <table:table-cell office:value-type="string" calcext:value-type="string">
            <text:p>この能力は魔力ゾーンで効果を発揮する。自分と相手は、戦場と魔力ゾーンの能力を発動できない。自分はマホウ使用できない。¶消耗</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96];[$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105.png</text:p>
          </table:table-cell>
          <table:table-cell table:style-name="ce11" table:formula="of:=CONCATENATE([$JSON.$A$1];[.$C496];[$JSON.$B$1];[.$E496];[$JSON.$C$1];[.F496];[$JSON.$D$1];[.$G496];[$JSON.$E$1];IF(ISNA([.$T496]);&quot;null&quot;;&quot;&quot;&quot;&quot;&amp;[.$T496]&amp;&quot;&quot;&quot;&quot;);[$JSON.$F$1];[.$V496];[$JSON.$G$1];IF(ISNA([.$X496]);&quot;null&quot;;&quot;&quot;&quot;&quot;&amp;[.$X496]&amp;&quot;&quot;&quot;&quot;);[$JSON.$H$1];[.$AA496];[$JSON.$I$1];[.$I496];[$JSON.$J$1];[.K496];[$JSON.$K$1];[.$M496];[$JSON.$L$1];[.$P496];[$JSON.$M$1];[.$O496];[$JSON.$N$1];[.$S496];[$JSON.$O$1];[.$U496];[$JSON.$P$1];IF(ISNA([.$W496]);&quot;null&quot;;[.$W496]);[$JSON.$Q$1];[.$Y496];[$JSON.$R$1];IF([.$Z496];&quot;true&quot;;&quot;false&quot;);[$JSON.$S$1];[.$A496];[$JSON.$T$1];[.$B496];[$JSON.$U$1])" office:value-type="string" office:string-value="{&quot;id&quot;:&quot;2nd1-105&quot;,&quot;name&quot;:&quot;太白のピラー&quot;,&quot;displayName&quot;:&quot;太白のピラー&quot;,&quot;kana&quot;:&quot;たいはくのぴらー&quot;,&quot;traitText&quot;:null,&quot;ruleText&quot;:&quot;この能力は魔力ゾーンで効果を発揮する。自分と相手は、戦場と魔力ゾーンの能力を発動できない。自分はマホウ使用できない。¶消耗&quot;,&quot;legacyText&quot;:&quot;復元&quot;,&quot;imageUrl&quot;:&quot;https://one-draw.jp/ijinden/cardlist/005/card/05_105.png&quot;,&quot;expansion&quot;:55,&quot;rarity&quot;:2,&quot;type&quot;:4,&quot;level&quot;:3,&quot;color&quot;:16,&quot;term&quot;:0,&quot;trait&quot;:0,&quot;power&quot;:null,&quot;legacy&quot;:3,&quot;anyNumCopies&quot;:false,&quot;orderTable&quot;:495,&quot;orderDeck&quot;:500}," calcext:value-type="string">
            <text:p>{"id":"2nd1-105","name":"太白のピラー","displayName":"太白のピラー","kana":"たいはくのぴらー","traitText":null,"ruleText":"この能力は魔力ゾーンで効果を発揮する。自分と相手は、戦場と魔力ゾーンの能力を発動できない。自分はマホウ使用できない。¶消耗","legacyText":"復元","imageUrl":"https://one-draw.jp/ijinden/cardlist/005/card/05_105.png","expansion":55,"rarity":2,"type":4,"level":3,"color":16,"term":0,"trait":0,"power":null,"legacy":3,"anyNumCopies":false,"orderTable":495,"orderDeck":500},</text:p>
          </table:table-cell>
          <table:table-cell table:number-columns-repeated="16356"/>
        </table:table-row>
        <table:table-row table:style-name="ro2">
          <table:table-cell table:style-name="ce11" office:value-type="float" office:value="496" calcext:value-type="float">
            <text:p>496</text:p>
          </table:table-cell>
          <table:table-cell table:style-name="ce11" office:value-type="float" office:value="494" calcext:value-type="float">
            <text:p>494</text:p>
          </table:table-cell>
          <table:table-cell table:formula="of:=CONCATENATE(&quot;2nd1-&quot;;TEXT([.D497];&quot;0&quot;))" office:value-type="string" office:string-value="2nd1-106" calcext:value-type="string">
            <text:p>2nd1-106</text:p>
          </table:table-cell>
          <table:table-cell office:value-type="float" office:value="106" calcext:value-type="float">
            <text:p>106</text:p>
          </table:table-cell>
          <table:table-cell office:value-type="string" calcext:value-type="string">
            <text:p>チャルカ</text:p>
          </table:table-cell>
          <table:table-cell table:style-name="ce11" table:formula="of:=[.E497]" office:value-type="string" office:string-value="チャルカ" calcext:value-type="string">
            <text:p>チャルカ</text:p>
          </table:table-cell>
          <table:table-cell office:value-type="string" calcext:value-type="string">
            <text:p>ちゃるか</text:p>
          </table:table-cell>
          <table:table-cell table:style-name="ce11" office:value-type="string" calcext:value-type="string">
            <text:p>第５弾ブースターパック</text:p>
          </table:table-cell>
          <table:table-cell table:style-name="ce11" table:formula="of:=VLOOKUP([.H497];[$収録番号.$A$1:$収録番号.$B$10];2;0)" office:value-type="float" office:value="55" calcext:value-type="float">
            <text:p>55</text:p>
          </table:table-cell>
          <table:table-cell office:value-type="string" calcext:value-type="string">
            <text:p>N</text:p>
          </table:table-cell>
          <table:table-cell table:style-name="ce11" table:formula="of:=VLOOKUP([.J497];[$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497];[$種類番号.$A$1:$種類番号.$B$4];2;0)" office:value-type="float" office:value="4" calcext:value-type="float">
            <text:p>4</text:p>
          </table:table-cell>
          <table:table-cell office:value-type="string" calcext:value-type="string">
            <text:p>無色</text:p>
          </table:table-cell>
          <table:table-cell table:style-name="ce11" table:formula="of:=VLOOKUP([.N497];[$色番号.$A$1:$色番号.$B$10];2;0)" office:value-type="float" office:value="64" calcext:value-type="float">
            <text:p>64</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97];[$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97];[$特性番号.$A$1:$特性番号.$B$8];2;0);0)" office:value-type="float" office:value="0" calcext:value-type="float">
            <text:p>0</text:p>
          </table:table-cell>
          <table:table-cell office:value-type="string" calcext:value-type="string">
            <text:p>この能力は、これが魔力ゾーンに置かれたときに発動する。「赤 青 緑 黄 紫」から1つを選ぶ。これは、このターンに限り選んだ色を得る。</text:p>
          </table:table-cell>
          <table:table-cell table:style-name="ce25" table:formula="of:=NA()" office:value-type="string" office:string-value="" calcext:value-type="error">
            <text:p>#N/A</text:p>
          </table:table-cell>
          <table:table-cell office:value-type="string" calcext:value-type="string">
            <text:p>魔力化</text:p>
          </table:table-cell>
          <table:table-cell table:style-name="ce11" table:formula="of:=IFERROR(VLOOKUP([.$X497];[$遺業能力番号.$A$1:$遺業能力番号.$B$9];2;0);0)" office:value-type="float" office:value="1" calcext:value-type="float">
            <text:p>1</text:p>
          </table:table-cell>
          <table:table-cell table:style-name="ce28" office:value-type="boolean" office:boolean-value="false" calcext:value-type="boolean">
            <text:p>FALSE</text:p>
          </table:table-cell>
          <table:table-cell office:value-type="string" calcext:value-type="string">
            <text:p>https://one-draw.jp/ijinden/cardlist/005/card/05_106.png</text:p>
          </table:table-cell>
          <table:table-cell table:style-name="ce11" table:formula="of:=CONCATENATE([$JSON.$A$1];[.$C497];[$JSON.$B$1];[.$E497];[$JSON.$C$1];[.F497];[$JSON.$D$1];[.$G497];[$JSON.$E$1];IF(ISNA([.$T497]);&quot;null&quot;;&quot;&quot;&quot;&quot;&amp;[.$T497]&amp;&quot;&quot;&quot;&quot;);[$JSON.$F$1];[.$V497];[$JSON.$G$1];IF(ISNA([.$X497]);&quot;null&quot;;&quot;&quot;&quot;&quot;&amp;[.$X497]&amp;&quot;&quot;&quot;&quot;);[$JSON.$H$1];[.$AA497];[$JSON.$I$1];[.$I497];[$JSON.$J$1];[.K497];[$JSON.$K$1];[.$M497];[$JSON.$L$1];[.$P497];[$JSON.$M$1];[.$O497];[$JSON.$N$1];[.$S497];[$JSON.$O$1];[.$U497];[$JSON.$P$1];IF(ISNA([.$W497]);&quot;null&quot;;[.$W497]);[$JSON.$Q$1];[.$Y497];[$JSON.$R$1];IF([.$Z497];&quot;true&quot;;&quot;false&quot;);[$JSON.$S$1];[.$A497];[$JSON.$T$1];[.$B497];[$JSON.$U$1])" office:value-type="string" office:string-value="{&quot;id&quot;:&quot;2nd1-106&quot;,&quot;name&quot;:&quot;チャルカ&quot;,&quot;displayName&quot;:&quot;チャルカ&quot;,&quot;kana&quot;:&quot;ちゃるか&quot;,&quot;traitText&quot;:null,&quot;ruleText&quot;:&quot;この能力は、これが魔力ゾーンに置かれたときに発動する。「赤 青 緑 黄 紫」から1つを選ぶ。これは、このターンに限り選んだ色を得る。&quot;,&quot;legacyText&quot;:&quot;魔力化&quot;,&quot;imageUrl&quot;:&quot;https://one-draw.jp/ijinden/cardlist/005/card/05_106.png&quot;,&quot;expansion&quot;:55,&quot;rarity&quot;:1,&quot;type&quot;:4,&quot;level&quot;:2,&quot;color&quot;:64,&quot;term&quot;:0,&quot;trait&quot;:0,&quot;power&quot;:null,&quot;legacy&quot;:1,&quot;anyNumCopies&quot;:false,&quot;orderTable&quot;:496,&quot;orderDeck&quot;:494}," calcext:value-type="string">
            <text:p>{"id":"2nd1-106","name":"チャルカ","displayName":"チャルカ","kana":"ちゃるか","traitText":null,"ruleText":"この能力は、これが魔力ゾーンに置かれたときに発動する。「赤 青 緑 黄 紫」から1つを選ぶ。これは、このターンに限り選んだ色を得る。","legacyText":"魔力化","imageUrl":"https://one-draw.jp/ijinden/cardlist/005/card/05_106.png","expansion":55,"rarity":1,"type":4,"level":2,"color":64,"term":0,"trait":0,"power":null,"legacy":1,"anyNumCopies":false,"orderTable":496,"orderDeck":494},</text:p>
          </table:table-cell>
          <table:table-cell table:number-columns-repeated="16356"/>
        </table:table-row>
        <table:table-row table:style-name="ro2">
          <table:table-cell table:style-name="ce11" office:value-type="float" office:value="497" calcext:value-type="float">
            <text:p>497</text:p>
          </table:table-cell>
          <table:table-cell table:style-name="ce11" office:value-type="float" office:value="476" calcext:value-type="float">
            <text:p>476</text:p>
          </table:table-cell>
          <table:table-cell table:formula="of:=CONCATENATE(&quot;2nd1-&quot;;TEXT([.D498];&quot;0&quot;))" office:value-type="string" office:string-value="2nd1-107" calcext:value-type="string">
            <text:p>2nd1-107</text:p>
          </table:table-cell>
          <table:table-cell office:value-type="float" office:value="107" calcext:value-type="float">
            <text:p>107</text:p>
          </table:table-cell>
          <table:table-cell office:value-type="string" calcext:value-type="string">
            <text:p>オリーブの枝</text:p>
          </table:table-cell>
          <table:table-cell table:style-name="ce11" table:formula="of:=[.E498]" office:value-type="string" office:string-value="オリーブの枝" calcext:value-type="string">
            <text:p>オリーブの枝</text:p>
          </table:table-cell>
          <table:table-cell office:value-type="string" calcext:value-type="string">
            <text:p>おりーぶのえだ</text:p>
          </table:table-cell>
          <table:table-cell table:style-name="ce11" office:value-type="string" calcext:value-type="string">
            <text:p>第５弾ブースターパック</text:p>
          </table:table-cell>
          <table:table-cell table:style-name="ce11" table:formula="of:=VLOOKUP([.H498];[$収録番号.$A$1:$収録番号.$B$10];2;0)" office:value-type="float" office:value="55" calcext:value-type="float">
            <text:p>55</text:p>
          </table:table-cell>
          <table:table-cell office:value-type="string" calcext:value-type="string">
            <text:p>R</text:p>
          </table:table-cell>
          <table:table-cell table:style-name="ce11" table:formula="of:=VLOOKUP([.J498];[$レアリティ番号.$A$1:$レアリティ番号.$B$4];2;0)" office:value-type="float" office:value="2" calcext:value-type="float">
            <text:p>2</text:p>
          </table:table-cell>
          <table:table-cell office:value-type="string" calcext:value-type="string">
            <text:p>マリョク</text:p>
          </table:table-cell>
          <table:table-cell table:style-name="ce11" table:formula="of:=VLOOKUP([.L498];[$種類番号.$A$1:$種類番号.$B$4];2;0)" office:value-type="float" office:value="4" calcext:value-type="float">
            <text:p>4</text:p>
          </table:table-cell>
          <table:table-cell office:value-type="string" calcext:value-type="string">
            <text:p>無色</text:p>
          </table:table-cell>
          <table:table-cell table:style-name="ce11" table:formula="of:=VLOOKUP([.N498];[$色番号.$A$1:$色番号.$B$10];2;0)" office:value-type="float" office:value="64" calcext:value-type="float">
            <text:p>64</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98];[$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98];[$特性番号.$A$1:$特性番号.$B$8];2;0);0)" office:value-type="float" office:value="0" calcext:value-type="float">
            <text:p>0</text:p>
          </table:table-cell>
          <table:table-cell office:value-type="string" calcext:value-type="string">
            <text:p>この能力は魔力ゾーンで効果を発揮する。自分と相手の戦場のレベル5以上でないイジンは、アタッカーにもブロッカーにもなれない。¶消耗</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98];[$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107.png</text:p>
          </table:table-cell>
          <table:table-cell table:style-name="ce11" table:formula="of:=CONCATENATE([$JSON.$A$1];[.$C498];[$JSON.$B$1];[.$E498];[$JSON.$C$1];[.F498];[$JSON.$D$1];[.$G498];[$JSON.$E$1];IF(ISNA([.$T498]);&quot;null&quot;;&quot;&quot;&quot;&quot;&amp;[.$T498]&amp;&quot;&quot;&quot;&quot;);[$JSON.$F$1];[.$V498];[$JSON.$G$1];IF(ISNA([.$X498]);&quot;null&quot;;&quot;&quot;&quot;&quot;&amp;[.$X498]&amp;&quot;&quot;&quot;&quot;);[$JSON.$H$1];[.$AA498];[$JSON.$I$1];[.$I498];[$JSON.$J$1];[.K498];[$JSON.$K$1];[.$M498];[$JSON.$L$1];[.$P498];[$JSON.$M$1];[.$O498];[$JSON.$N$1];[.$S498];[$JSON.$O$1];[.$U498];[$JSON.$P$1];IF(ISNA([.$W498]);&quot;null&quot;;[.$W498]);[$JSON.$Q$1];[.$Y498];[$JSON.$R$1];IF([.$Z498];&quot;true&quot;;&quot;false&quot;);[$JSON.$S$1];[.$A498];[$JSON.$T$1];[.$B498];[$JSON.$U$1])" office:value-type="string" office:string-value="{&quot;id&quot;:&quot;2nd1-107&quot;,&quot;name&quot;:&quot;オリーブの枝&quot;,&quot;displayName&quot;:&quot;オリーブの枝&quot;,&quot;kana&quot;:&quot;おりーぶのえだ&quot;,&quot;traitText&quot;:null,&quot;ruleText&quot;:&quot;この能力は魔力ゾーンで効果を発揮する。自分と相手の戦場のレベル5以上でないイジンは、アタッカーにもブロッカーにもなれない。¶消耗&quot;,&quot;legacyText&quot;:&quot;復元&quot;,&quot;imageUrl&quot;:&quot;https://one-draw.jp/ijinden/cardlist/005/card/05_107.png&quot;,&quot;expansion&quot;:55,&quot;rarity&quot;:2,&quot;type&quot;:4,&quot;level&quot;:1,&quot;color&quot;:64,&quot;term&quot;:0,&quot;trait&quot;:0,&quot;power&quot;:null,&quot;legacy&quot;:3,&quot;anyNumCopies&quot;:false,&quot;orderTable&quot;:497,&quot;orderDeck&quot;:476}," calcext:value-type="string">
            <text:p>{"id":"2nd1-107","name":"オリーブの枝","displayName":"オリーブの枝","kana":"おりーぶのえだ","traitText":null,"ruleText":"この能力は魔力ゾーンで効果を発揮する。自分と相手の戦場のレベル5以上でないイジンは、アタッカーにもブロッカーにもなれない。¶消耗","legacyText":"復元","imageUrl":"https://one-draw.jp/ijinden/cardlist/005/card/05_107.png","expansion":55,"rarity":2,"type":4,"level":1,"color":64,"term":0,"trait":0,"power":null,"legacy":3,"anyNumCopies":false,"orderTable":497,"orderDeck":476},</text:p>
          </table:table-cell>
          <table:table-cell table:number-columns-repeated="16356"/>
        </table:table-row>
        <table:table-row table:style-name="ro2">
          <table:table-cell table:style-name="ce11" office:value-type="float" office:value="498" calcext:value-type="float">
            <text:p>498</text:p>
          </table:table-cell>
          <table:table-cell table:style-name="ce11" office:value-type="float" office:value="495" calcext:value-type="float">
            <text:p>495</text:p>
          </table:table-cell>
          <table:table-cell table:formula="of:=CONCATENATE(&quot;2nd1-&quot;;TEXT([.D499];&quot;0&quot;))" office:value-type="string" office:string-value="2nd1-108" calcext:value-type="string">
            <text:p>2nd1-108</text:p>
          </table:table-cell>
          <table:table-cell office:value-type="float" office:value="108" calcext:value-type="float">
            <text:p>108</text:p>
          </table:table-cell>
          <table:table-cell office:value-type="string" calcext:value-type="string">
            <text:p>ギルデッドグース</text:p>
          </table:table-cell>
          <table:table-cell table:style-name="ce11" table:formula="of:=[.E499]" office:value-type="string" office:string-value="ギルデッドグース" calcext:value-type="string">
            <text:p>ギルデッドグース</text:p>
          </table:table-cell>
          <table:table-cell office:value-type="string" calcext:value-type="string">
            <text:p>ぎるでっどぐーす</text:p>
          </table:table-cell>
          <table:table-cell table:style-name="ce11" office:value-type="string" calcext:value-type="string">
            <text:p>第５弾ブースターパック</text:p>
          </table:table-cell>
          <table:table-cell table:style-name="ce11" table:formula="of:=VLOOKUP([.H499];[$収録番号.$A$1:$収録番号.$B$10];2;0)" office:value-type="float" office:value="55" calcext:value-type="float">
            <text:p>55</text:p>
          </table:table-cell>
          <table:table-cell office:value-type="string" calcext:value-type="string">
            <text:p>R</text:p>
          </table:table-cell>
          <table:table-cell table:style-name="ce11" table:formula="of:=VLOOKUP([.J499];[$レアリティ番号.$A$1:$レアリティ番号.$B$4];2;0)" office:value-type="float" office:value="2" calcext:value-type="float">
            <text:p>2</text:p>
          </table:table-cell>
          <table:table-cell office:value-type="string" calcext:value-type="string">
            <text:p>マリョク</text:p>
          </table:table-cell>
          <table:table-cell table:style-name="ce11" table:formula="of:=VLOOKUP([.L499];[$種類番号.$A$1:$種類番号.$B$4];2;0)" office:value-type="float" office:value="4" calcext:value-type="float">
            <text:p>4</text:p>
          </table:table-cell>
          <table:table-cell office:value-type="string" calcext:value-type="string">
            <text:p>無色</text:p>
          </table:table-cell>
          <table:table-cell table:style-name="ce11" table:formula="of:=VLOOKUP([.N499];[$色番号.$A$1:$色番号.$B$10];2;0)" office:value-type="float" office:value="64" calcext:value-type="float">
            <text:p>64</text:p>
          </table:table-cell>
          <table:table-cell office:value-type="float" office:value="2" calcext:value-type="float">
            <text:p>2</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499];[$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499];[$特性番号.$A$1:$特性番号.$B$8];2;0);0)" office:value-type="float" office:value="0" calcext:value-type="float">
            <text:p>0</text:p>
          </table:table-cell>
          <table:table-cell office:value-type="string" calcext:value-type="string">
            <text:p>この能力は、相手のエンドフェイズが開始したときに魔力ゾーンで発動できる。2ドローして、これを山札の上に戻す。</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499];[$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108.png</text:p>
          </table:table-cell>
          <table:table-cell table:style-name="ce11" table:formula="of:=CONCATENATE([$JSON.$A$1];[.$C499];[$JSON.$B$1];[.$E499];[$JSON.$C$1];[.F499];[$JSON.$D$1];[.$G499];[$JSON.$E$1];IF(ISNA([.$T499]);&quot;null&quot;;&quot;&quot;&quot;&quot;&amp;[.$T499]&amp;&quot;&quot;&quot;&quot;);[$JSON.$F$1];[.$V499];[$JSON.$G$1];IF(ISNA([.$X499]);&quot;null&quot;;&quot;&quot;&quot;&quot;&amp;[.$X499]&amp;&quot;&quot;&quot;&quot;);[$JSON.$H$1];[.$AA499];[$JSON.$I$1];[.$I499];[$JSON.$J$1];[.K499];[$JSON.$K$1];[.$M499];[$JSON.$L$1];[.$P499];[$JSON.$M$1];[.$O499];[$JSON.$N$1];[.$S499];[$JSON.$O$1];[.$U499];[$JSON.$P$1];IF(ISNA([.$W499]);&quot;null&quot;;[.$W499]);[$JSON.$Q$1];[.$Y499];[$JSON.$R$1];IF([.$Z499];&quot;true&quot;;&quot;false&quot;);[$JSON.$S$1];[.$A499];[$JSON.$T$1];[.$B499];[$JSON.$U$1])" office:value-type="string" office:string-value="{&quot;id&quot;:&quot;2nd1-108&quot;,&quot;name&quot;:&quot;ギルデッドグース&quot;,&quot;displayName&quot;:&quot;ギルデッドグース&quot;,&quot;kana&quot;:&quot;ぎるでっどぐーす&quot;,&quot;traitText&quot;:null,&quot;ruleText&quot;:&quot;この能力は、相手のエンドフェイズが開始したときに魔力ゾーンで発動できる。2ドローして、これを山札の上に戻す。&quot;,&quot;legacyText&quot;:&quot;復元&quot;,&quot;imageUrl&quot;:&quot;https://one-draw.jp/ijinden/cardlist/005/card/05_108.png&quot;,&quot;expansion&quot;:55,&quot;rarity&quot;:2,&quot;type&quot;:4,&quot;level&quot;:2,&quot;color&quot;:64,&quot;term&quot;:0,&quot;trait&quot;:0,&quot;power&quot;:null,&quot;legacy&quot;:3,&quot;anyNumCopies&quot;:false,&quot;orderTable&quot;:498,&quot;orderDeck&quot;:495}," calcext:value-type="string">
            <text:p>{"id":"2nd1-108","name":"ギルデッドグース","displayName":"ギルデッドグース","kana":"ぎるでっどぐーす","traitText":null,"ruleText":"この能力は、相手のエンドフェイズが開始したときに魔力ゾーンで発動できる。2ドローして、これを山札の上に戻す。","legacyText":"復元","imageUrl":"https://one-draw.jp/ijinden/cardlist/005/card/05_108.png","expansion":55,"rarity":2,"type":4,"level":2,"color":64,"term":0,"trait":0,"power":null,"legacy":3,"anyNumCopies":false,"orderTable":498,"orderDeck":495},</text:p>
          </table:table-cell>
          <table:table-cell table:number-columns-repeated="16356"/>
        </table:table-row>
        <table:table-row table:style-name="ro2">
          <table:table-cell table:style-name="ce11" office:value-type="float" office:value="499" calcext:value-type="float">
            <text:p>499</text:p>
          </table:table-cell>
          <table:table-cell table:style-name="ce11" office:value-type="float" office:value="477" calcext:value-type="float">
            <text:p>477</text:p>
          </table:table-cell>
          <table:table-cell table:formula="of:=CONCATENATE(&quot;2nd1-&quot;;TEXT([.D500];&quot;0&quot;))" office:value-type="string" office:string-value="2nd1-109" calcext:value-type="string">
            <text:p>2nd1-109</text:p>
          </table:table-cell>
          <table:table-cell office:value-type="float" office:value="109" calcext:value-type="float">
            <text:p>109</text:p>
          </table:table-cell>
          <table:table-cell office:value-type="string" calcext:value-type="string">
            <text:p>ハースストーン</text:p>
          </table:table-cell>
          <table:table-cell table:style-name="ce11" table:formula="of:=[.E500]" office:value-type="string" office:string-value="ハースストーン" calcext:value-type="string">
            <text:p>ハースストーン</text:p>
          </table:table-cell>
          <table:table-cell office:value-type="string" calcext:value-type="string">
            <text:p>はーすすとーん</text:p>
          </table:table-cell>
          <table:table-cell table:style-name="ce11" office:value-type="string" calcext:value-type="string">
            <text:p>第５弾ブースターパック</text:p>
          </table:table-cell>
          <table:table-cell table:style-name="ce11" table:formula="of:=VLOOKUP([.H500];[$収録番号.$A$1:$収録番号.$B$10];2;0)" office:value-type="float" office:value="55" calcext:value-type="float">
            <text:p>55</text:p>
          </table:table-cell>
          <table:table-cell office:value-type="string" calcext:value-type="string">
            <text:p>N</text:p>
          </table:table-cell>
          <table:table-cell table:style-name="ce11" table:formula="of:=VLOOKUP([.J500];[$レアリティ番号.$A$1:$レアリティ番号.$B$4];2;0)" office:value-type="float" office:value="1" calcext:value-type="float">
            <text:p>1</text:p>
          </table:table-cell>
          <table:table-cell office:value-type="string" calcext:value-type="string">
            <text:p>マリョク</text:p>
          </table:table-cell>
          <table:table-cell table:style-name="ce11" table:formula="of:=VLOOKUP([.L500];[$種類番号.$A$1:$種類番号.$B$4];2;0)" office:value-type="float" office:value="4" calcext:value-type="float">
            <text:p>4</text:p>
          </table:table-cell>
          <table:table-cell office:value-type="string" calcext:value-type="string">
            <text:p>無色</text:p>
          </table:table-cell>
          <table:table-cell table:style-name="ce11" table:formula="of:=VLOOKUP([.N500];[$色番号.$A$1:$色番号.$B$10];2;0)" office:value-type="float" office:value="64" calcext:value-type="float">
            <text:p>64</text:p>
          </table:table-cell>
          <table:table-cell office:value-type="float" office:value="1" calcext:value-type="float">
            <text:p>1</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00];[$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500];[$特性番号.$A$1:$特性番号.$B$8];2;0);0)" office:value-type="float" office:value="0" calcext:value-type="float">
            <text:p>0</text:p>
          </table:table-cell>
          <table:table-cell office:value-type="string" calcext:value-type="string">
            <text:p>この能力は、自分の魔力ゾーンに『ストーン』マリョクが置かれたときに魔力ゾーンで発動する。1ドローする。</text:p>
          </table:table-cell>
          <table:table-cell table:style-name="ce25" table:formula="of:=NA()" office:value-type="string" office:string-value="" calcext:value-type="error">
            <text:p>#N/A</text:p>
          </table:table-cell>
          <table:table-cell office:value-type="string" calcext:value-type="string">
            <text:p>復元</text:p>
          </table:table-cell>
          <table:table-cell table:style-name="ce11" table:formula="of:=IFERROR(VLOOKUP([.$X500];[$遺業能力番号.$A$1:$遺業能力番号.$B$9];2;0);0)" office:value-type="float" office:value="3" calcext:value-type="float">
            <text:p>3</text:p>
          </table:table-cell>
          <table:table-cell table:style-name="ce28" office:value-type="boolean" office:boolean-value="false" calcext:value-type="boolean">
            <text:p>FALSE</text:p>
          </table:table-cell>
          <table:table-cell office:value-type="string" calcext:value-type="string">
            <text:p>https://one-draw.jp/ijinden/cardlist/005/card/05_109.png</text:p>
          </table:table-cell>
          <table:table-cell table:style-name="ce11" table:formula="of:=CONCATENATE([$JSON.$A$1];[.$C500];[$JSON.$B$1];[.$E500];[$JSON.$C$1];[.F500];[$JSON.$D$1];[.$G500];[$JSON.$E$1];IF(ISNA([.$T500]);&quot;null&quot;;&quot;&quot;&quot;&quot;&amp;[.$T500]&amp;&quot;&quot;&quot;&quot;);[$JSON.$F$1];[.$V500];[$JSON.$G$1];IF(ISNA([.$X500]);&quot;null&quot;;&quot;&quot;&quot;&quot;&amp;[.$X500]&amp;&quot;&quot;&quot;&quot;);[$JSON.$H$1];[.$AA500];[$JSON.$I$1];[.$I500];[$JSON.$J$1];[.K500];[$JSON.$K$1];[.$M500];[$JSON.$L$1];[.$P500];[$JSON.$M$1];[.$O500];[$JSON.$N$1];[.$S500];[$JSON.$O$1];[.$U500];[$JSON.$P$1];IF(ISNA([.$W500]);&quot;null&quot;;[.$W500]);[$JSON.$Q$1];[.$Y500];[$JSON.$R$1];IF([.$Z500];&quot;true&quot;;&quot;false&quot;);[$JSON.$S$1];[.$A500];[$JSON.$T$1];[.$B500];[$JSON.$U$1])" office:value-type="string" office:string-value="{&quot;id&quot;:&quot;2nd1-109&quot;,&quot;name&quot;:&quot;ハースストーン&quot;,&quot;displayName&quot;:&quot;ハースストーン&quot;,&quot;kana&quot;:&quot;はーすすとーん&quot;,&quot;traitText&quot;:null,&quot;ruleText&quot;:&quot;この能力は、自分の魔力ゾーンに『ストーン』マリョクが置かれたときに魔力ゾーンで発動する。1ドローする。&quot;,&quot;legacyText&quot;:&quot;復元&quot;,&quot;imageUrl&quot;:&quot;https://one-draw.jp/ijinden/cardlist/005/card/05_109.png&quot;,&quot;expansion&quot;:55,&quot;rarity&quot;:1,&quot;type&quot;:4,&quot;level&quot;:1,&quot;color&quot;:64,&quot;term&quot;:0,&quot;trait&quot;:0,&quot;power&quot;:null,&quot;legacy&quot;:3,&quot;anyNumCopies&quot;:false,&quot;orderTable&quot;:499,&quot;orderDeck&quot;:477}," calcext:value-type="string">
            <text:p>{"id":"2nd1-109","name":"ハースストーン","displayName":"ハースストーン","kana":"はーすすとーん","traitText":null,"ruleText":"この能力は、自分の魔力ゾーンに『ストーン』マリョクが置かれたときに魔力ゾーンで発動する。1ドローする。","legacyText":"復元","imageUrl":"https://one-draw.jp/ijinden/cardlist/005/card/05_109.png","expansion":55,"rarity":1,"type":4,"level":1,"color":64,"term":0,"trait":0,"power":null,"legacy":3,"anyNumCopies":false,"orderTable":499,"orderDeck":477},</text:p>
          </table:table-cell>
          <table:table-cell table:number-columns-repeated="16356"/>
        </table:table-row>
        <table:table-row table:style-name="ro2">
          <table:table-cell table:style-name="ce11" office:value-type="float" office:value="500" calcext:value-type="float">
            <text:p>500</text:p>
          </table:table-cell>
          <table:table-cell table:style-name="ce11" office:value-type="float" office:value="194" calcext:value-type="float">
            <text:p>194</text:p>
          </table:table-cell>
          <table:table-cell table:formula="of:=CONCATENATE(&quot;2nd1-&quot;;TEXT([.D501];&quot;0&quot;))" office:value-type="string" office:string-value="2nd1-110" calcext:value-type="string">
            <text:p>2nd1-110</text:p>
          </table:table-cell>
          <table:table-cell office:value-type="float" office:value="110" calcext:value-type="float">
            <text:p>110</text:p>
          </table:table-cell>
          <table:table-cell office:value-type="string" calcext:value-type="string">
            <text:p>武田信玄</text:p>
          </table:table-cell>
          <table:table-cell office:value-type="string" calcext:value-type="string">
            <text:p>武田信玄 (PSR)</text:p>
          </table:table-cell>
          <table:table-cell office:value-type="string" calcext:value-type="string">
            <text:p>たけだしんげん</text:p>
          </table:table-cell>
          <table:table-cell table:style-name="ce11" office:value-type="string" calcext:value-type="string">
            <text:p>第５弾ブースターパック</text:p>
          </table:table-cell>
          <table:table-cell table:style-name="ce11" table:formula="of:=VLOOKUP([.H501];[$収録番号.$A$1:$収録番号.$B$10];2;0)" office:value-type="float" office:value="55" calcext:value-type="float">
            <text:p>55</text:p>
          </table:table-cell>
          <table:table-cell office:value-type="string" calcext:value-type="string">
            <text:p>PSR</text:p>
          </table:table-cell>
          <table:table-cell table:style-name="ce11" table:formula="of:=VLOOKUP([.J501];[$レアリティ番号.$A$1:$レアリティ番号.$B$4];2;0)" office:value-type="float" office:value="8" calcext:value-type="float">
            <text:p>8</text:p>
          </table:table-cell>
          <table:table-cell office:value-type="string" calcext:value-type="string">
            <text:p>イジン</text:p>
          </table:table-cell>
          <table:table-cell table:style-name="ce11" table:formula="of:=VLOOKUP([.L501];[$種類番号.$A$1:$種類番号.$B$4];2;0)" office:value-type="float" office:value="1" calcext:value-type="float">
            <text:p>1</text:p>
          </table:table-cell>
          <table:table-cell office:value-type="string" calcext:value-type="string">
            <text:p>赤</text:p>
          </table:table-cell>
          <table:table-cell table:style-name="ce11" table:formula="of:=VLOOKUP([.N501];[$色番号.$A$1:$色番号.$B$10];2;0)" office:value-type="float" office:value="1" calcext:value-type="float">
            <text:p>1</text:p>
          </table:table-cell>
          <table:table-cell office:value-type="float" office:value="5" calcext:value-type="float">
            <text:p>5</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01];[$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501];[$特性番号.$A$1:$特性番号.$B$8];2;0);0)" office:value-type="float" office:value="0" calcext:value-type="float">
            <text:p>0</text:p>
          </table:table-cell>
          <table:table-cell office:value-type="string" calcext:value-type="string">
            <text:p>この能力は、自分の戦場に「勝鬨」を持つイジンが2体以上いるなら、戦場で効果を発揮する。これは「クアドラプルプレッシャー」を得る。¶アタック+6000</text:p>
          </table:table-cell>
          <table:table-cell office:value-type="float" office:value="4000" calcext:value-type="float">
            <text:p>4000</text:p>
          </table:table-cell>
          <table:table-cell office:value-type="string" calcext:value-type="string">
            <text:p>1ドローする</text:p>
          </table:table-cell>
          <table:table-cell table:style-name="ce11" table:formula="of:=IFERROR(VLOOKUP([.$X501];[$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110.png</text:p>
          </table:table-cell>
          <table:table-cell table:style-name="ce11" table:formula="of:=CONCATENATE([$JSON.$A$1];[.$C501];[$JSON.$B$1];[.$E501];[$JSON.$C$1];[.F501];[$JSON.$D$1];[.$G501];[$JSON.$E$1];IF(ISNA([.$T501]);&quot;null&quot;;&quot;&quot;&quot;&quot;&amp;[.$T501]&amp;&quot;&quot;&quot;&quot;);[$JSON.$F$1];[.$V501];[$JSON.$G$1];IF(ISNA([.$X501]);&quot;null&quot;;&quot;&quot;&quot;&quot;&amp;[.$X501]&amp;&quot;&quot;&quot;&quot;);[$JSON.$H$1];[.$AA501];[$JSON.$I$1];[.$I501];[$JSON.$J$1];[.K501];[$JSON.$K$1];[.$M501];[$JSON.$L$1];[.$P501];[$JSON.$M$1];[.$O501];[$JSON.$N$1];[.$S501];[$JSON.$O$1];[.$U501];[$JSON.$P$1];IF(ISNA([.$W501]);&quot;null&quot;;[.$W501]);[$JSON.$Q$1];[.$Y501];[$JSON.$R$1];IF([.$Z501];&quot;true&quot;;&quot;false&quot;);[$JSON.$S$1];[.$A501];[$JSON.$T$1];[.$B501];[$JSON.$U$1])" office:value-type="string" office:string-value="{&quot;id&quot;:&quot;2nd1-110&quot;,&quot;name&quot;:&quot;武田信玄&quot;,&quot;displayName&quot;:&quot;武田信玄 (PSR)&quot;,&quot;kana&quot;:&quot;たけだしんげん&quot;,&quot;traitText&quot;:null,&quot;ruleText&quot;:&quot;この能力は、自分の戦場に「勝鬨」を持つイジンが2体以上いるなら、戦場で効果を発揮する。これは「クアドラプルプレッシャー」を得る。¶アタック+6000&quot;,&quot;legacyText&quot;:&quot;1ドローする&quot;,&quot;imageUrl&quot;:&quot;https://one-draw.jp/ijinden/cardlist/005/card/05_110.png&quot;,&quot;expansion&quot;:55,&quot;rarity&quot;:8,&quot;type&quot;:1,&quot;level&quot;:5,&quot;color&quot;:1,&quot;term&quot;:0,&quot;trait&quot;:0,&quot;power&quot;:4000,&quot;legacy&quot;:4,&quot;anyNumCopies&quot;:false,&quot;orderTable&quot;:500,&quot;orderDeck&quot;:194}," calcext:value-type="string">
            <text:p>{"id":"2nd1-110","name":"武田信玄","displayName":"武田信玄 (PSR)","kana":"たけだしんげん","traitText":null,"ruleText":"この能力は、自分の戦場に「勝鬨」を持つイジンが2体以上いるなら、戦場で効果を発揮する。これは「クアドラプルプレッシャー」を得る。¶アタック+6000","legacyText":"1ドローする","imageUrl":"https://one-draw.jp/ijinden/cardlist/005/card/05_110.png","expansion":55,"rarity":8,"type":1,"level":5,"color":1,"term":0,"trait":0,"power":4000,"legacy":4,"anyNumCopies":false,"orderTable":500,"orderDeck":194},</text:p>
          </table:table-cell>
          <table:table-cell table:number-columns-repeated="16356"/>
        </table:table-row>
        <table:table-row table:style-name="ro2">
          <table:table-cell table:style-name="ce11" office:value-type="float" office:value="501" calcext:value-type="float">
            <text:p>501</text:p>
          </table:table-cell>
          <table:table-cell table:style-name="ce11" office:value-type="float" office:value="94" calcext:value-type="float">
            <text:p>94</text:p>
          </table:table-cell>
          <table:table-cell table:formula="of:=CONCATENATE(&quot;2nd1-&quot;;TEXT([.D502];&quot;0&quot;))" office:value-type="string" office:string-value="2nd1-111" calcext:value-type="string">
            <text:p>2nd1-111</text:p>
          </table:table-cell>
          <table:table-cell office:value-type="float" office:value="111" calcext:value-type="float">
            <text:p>111</text:p>
          </table:table-cell>
          <table:table-cell office:value-type="string" calcext:value-type="string">
            <text:p>ヴィクトリア女王</text:p>
          </table:table-cell>
          <table:table-cell office:value-type="string" calcext:value-type="string">
            <text:p>ヴィクトリア女王 (PSR)</text:p>
          </table:table-cell>
          <table:table-cell office:value-type="string" calcext:value-type="string">
            <text:p>ゔぃくとりあじょうおう</text:p>
          </table:table-cell>
          <table:table-cell table:style-name="ce11" office:value-type="string" calcext:value-type="string">
            <text:p>第５弾ブースターパック</text:p>
          </table:table-cell>
          <table:table-cell table:style-name="ce11" table:formula="of:=VLOOKUP([.H502];[$収録番号.$A$1:$収録番号.$B$10];2;0)" office:value-type="float" office:value="55" calcext:value-type="float">
            <text:p>55</text:p>
          </table:table-cell>
          <table:table-cell office:value-type="string" calcext:value-type="string">
            <text:p>PSR</text:p>
          </table:table-cell>
          <table:table-cell table:style-name="ce11" table:formula="of:=VLOOKUP([.J502];[$レアリティ番号.$A$1:$レアリティ番号.$B$4];2;0)" office:value-type="float" office:value="8" calcext:value-type="float">
            <text:p>8</text:p>
          </table:table-cell>
          <table:table-cell office:value-type="string" calcext:value-type="string">
            <text:p>イジン</text:p>
          </table:table-cell>
          <table:table-cell table:style-name="ce11" table:formula="of:=VLOOKUP([.L502];[$種類番号.$A$1:$種類番号.$B$4];2;0)" office:value-type="float" office:value="1" calcext:value-type="float">
            <text:p>1</text:p>
          </table:table-cell>
          <table:table-cell office:value-type="string" calcext:value-type="string">
            <text:p>赤</text:p>
          </table:table-cell>
          <table:table-cell table:style-name="ce11" table:formula="of:=VLOOKUP([.N502];[$色番号.$A$1:$色番号.$B$10];2;0)" office:value-type="float" office:value="1" calcext:value-type="float">
            <text:p>1</text:p>
          </table:table-cell>
          <table:table-cell office:value-type="float" office:value="3" calcext:value-type="float">
            <text:p>3</text:p>
          </table:table-cell>
          <table:table-cell table:style-name="ce11" table:formula="of:=NA()" office:value-type="string" office:string-value="" calcext:value-type="error">
            <text:p>#N/A</text:p>
          </table:table-cell>
          <table:table-cell table:style-name="ce11" table:formula="of:=NA()" office:value-type="string" office:string-value="" calcext:value-type="error">
            <text:p>#N/A</text:p>
          </table:table-cell>
          <table:table-cell table:style-name="ce11" table:formula="of:=IFERROR(VLOOKUP([.$R502];[$能力語番号.$A$1:$能力語番号.$B$11];2;0);0)" office:value-type="float" office:value="0" calcext:value-type="float">
            <text:p>0</text:p>
          </table:table-cell>
          <table:table-cell table:formula="of:=NA()" office:value-type="string" office:string-value="" calcext:value-type="error">
            <text:p>#N/A</text:p>
          </table:table-cell>
          <table:table-cell table:style-name="ce11" table:formula="of:=IFERROR(VLOOKUP([.$T502];[$特性番号.$A$1:$特性番号.$B$8];2;0);0)" office:value-type="float" office:value="0" calcext:value-type="float">
            <text:p>0</text:p>
          </table:table-cell>
          <table:table-cell office:value-type="string" calcext:value-type="string">
            <text:p>この能力は、これが戦場に置かれたときに発動できる。次のどちらかの効果を選んで発揮する。¶・相手の戦場のパワー1000以下のイジンすべてを破壊する。¶・相手の戦場のハイケイすべてを破壊する。</text:p>
          </table:table-cell>
          <table:table-cell office:value-type="float" office:value="3000" calcext:value-type="float">
            <text:p>3000</text:p>
          </table:table-cell>
          <table:table-cell office:value-type="string" calcext:value-type="string">
            <text:p>1ドローする</text:p>
          </table:table-cell>
          <table:table-cell table:style-name="ce11" table:formula="of:=IFERROR(VLOOKUP([.$X502];[$遺業能力番号.$A$1:$遺業能力番号.$B$9];2;0);0)" office:value-type="float" office:value="4" calcext:value-type="float">
            <text:p>4</text:p>
          </table:table-cell>
          <table:table-cell table:style-name="ce28" office:value-type="boolean" office:boolean-value="false" calcext:value-type="boolean">
            <text:p>FALSE</text:p>
          </table:table-cell>
          <table:table-cell office:value-type="string" calcext:value-type="string">
            <text:p>https://one-draw.jp/ijinden/cardlist/005/card/05_111.png</text:p>
          </table:table-cell>
          <table:table-cell table:style-name="ce11" table:formula="of:=CONCATENATE([$JSON.$A$1];[.$C502];[$JSON.$B$1];[.$E502];[$JSON.$C$1];[.F502];[$JSON.$D$1];[.$G502];[$JSON.$E$1];IF(ISNA([.$T502]);&quot;null&quot;;&quot;&quot;&quot;&quot;&amp;[.$T502]&amp;&quot;&quot;&quot;&quot;);[$JSON.$F$1];[.$V502];[$JSON.$G$1];IF(ISNA([.$X502]);&quot;null&quot;;&quot;&quot;&quot;&quot;&amp;[.$X502]&amp;&quot;&quot;&quot;&quot;);[$JSON.$H$1];[.$AA502];[$JSON.$I$1];[.$I502];[$JSON.$J$1];[.K502];[$JSON.$K$1];[.$M502];[$JSON.$L$1];[.$P502];[$JSON.$M$1];[.$O502];[$JSON.$N$1];[.$S502];[$JSON.$O$1];[.$U502];[$JSON.$P$1];IF(ISNA([.$W502]);&quot;null&quot;;[.$W502]);[$JSON.$Q$1];[.$Y502];[$JSON.$R$1];IF([.$Z502];&quot;true&quot;;&quot;false&quot;);[$JSON.$S$1];[.$A502];[$JSON.$T$1];[.$B502];[$JSON.$U$1])" office:value-type="string" office:string-value="{&quot;id&quot;:&quot;2nd1-111&quot;,&quot;name&quot;:&quot;ヴィクトリア女王&quot;,&quot;displayName&quot;:&quot;ヴィクトリア女王 (PSR)&quot;,&quot;kana&quot;:&quot;ゔぃくとりあじょうおう&quot;,&quot;traitText&quot;:null,&quot;ruleText&quot;:&quot;この能力は、これが戦場に置かれたときに発動できる。次のどちらかの効果を選んで発揮する。¶・相手の戦場のパワー1000以下のイジンすべてを破壊する。¶・相手の戦場のハイケイすべてを破壊する。&quot;,&quot;legacyText&quot;:&quot;1ドローする&quot;,&quot;imageUrl&quot;:&quot;https://one-draw.jp/ijinden/cardlist/005/card/05_111.png&quot;,&quot;expansion&quot;:55,&quot;rarity&quot;:8,&quot;type&quot;:1,&quot;level&quot;:3,&quot;color&quot;:1,&quot;term&quot;:0,&quot;trait&quot;:0,&quot;power&quot;:3000,&quot;legacy&quot;:4,&quot;anyNumCopies&quot;:false,&quot;orderTable&quot;:501,&quot;orderDeck&quot;:94}," calcext:value-type="string">
            <text:p>{"id":"2nd1-111","name":"ヴィクトリア女王","displayName":"ヴィクトリア女王 (PSR)","kana":"ゔぃくとりあじょうおう","traitText":null,"ruleText":"この能力は、これが戦場に置かれたときに発動できる。次のどちらかの効果を選んで発揮する。¶・相手の戦場のパワー1000以下のイジンすべてを破壊する。¶・相手の戦場のハイケイすべてを破壊する。","legacyText":"1ドローする","imageUrl":"https://one-draw.jp/ijinden/cardlist/005/card/05_111.png","expansion":55,"rarity":8,"type":1,"level":3,"color":1,"term":0,"trait":0,"power":3000,"legacy":4,"anyNumCopies":false,"orderTable":501,"orderDeck":94},</text:p>
          </table:table-cell>
          <table:table-cell table:number-columns-repeated="16356"/>
        </table:table-row>
        <table:table-row table:style-name="ro2" table:number-rows-repeated="1048073">
          <table:table-cell table:number-columns-repeated="16384"/>
        </table:table-row>
        <table:table-row table:style-name="ro2">
          <table:table-cell table:number-columns-repeated="16384"/>
        </table:table-row>
      </table:table>
      <table:table table:name="収録番号" table:style-name="ta1">
        <table:table-column table:style-name="co5" table:default-cell-style-name="Default"/>
        <table:table-column table:style-name="co17"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row table:style-name="ro2">
          <table:table-cell office:value-type="string" calcext:value-type="string">
            <text:p>第５弾ブースターパック</text:p>
          </table:table-cell>
          <table:table-cell office:value-type="float" office:value="55" calcext:value-type="float">
            <text:p>55</text:p>
          </table:table-cell>
        </table:table-row>
      </table:table>
      <table:table table:name="レアリティ番号" table:style-name="ta1">
        <table:table-column table:style-name="co7" table:default-cell-style-name="Default"/>
        <table:table-column table:style-name="co18" table:default-cell-style-name="Default"/>
        <table:table-row table:style-name="ro2">
          <table:table-cell office:value-type="string" calcext:value-type="string">
            <text:p>N</text:p>
          </table:table-cell>
          <table:table-cell office:value-type="float" office:value="1" calcext:value-type="float">
            <text:p>1</text:p>
          </table:table-cell>
        </table:table-row>
        <table:table-row table:style-name="ro2">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SR</text:p>
          </table:table-cell>
          <table:table-cell office:value-type="float" office:value="4" calcext:value-type="float">
            <text:p>4</text:p>
          </table:table-cell>
        </table:table-row>
        <table:table-row table:style-name="ro2">
          <table:table-cell office:value-type="string" calcext:value-type="string">
            <text:p>PSR</text:p>
          </table:table-cell>
          <table:table-cell office:value-type="float" office:value="8" calcext:value-type="float">
            <text:p>8</text:p>
          </table:table-cell>
        </table:table-row>
      </table:table>
      <table:table table:name="種類番号" table:style-name="ta1">
        <table:table-column table:style-name="co8" table:default-cell-style-name="Default"/>
        <table:table-column table:style-name="co18"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7" table:default-cell-style-name="Default"/>
        <table:table-column table:style-name="co17"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10" table:default-cell-style-name="Default"/>
        <table:table-column table:style-name="co1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row table:style-name="ro2">
          <table:table-cell office:value-type="string" calcext:value-type="string">
            <text:p>勝鬨</text:p>
          </table:table-cell>
          <table:table-cell office:value-type="float" office:value="1024" calcext:value-type="float">
            <text:p>1024</text:p>
          </table:table-cell>
        </table:table-row>
      </table:table>
      <table:table table:name="特性番号" table:style-name="ta1">
        <table:table-column table:style-name="co12" table:default-cell-style-name="Default"/>
        <table:table-column table:style-name="co17"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 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 志願</text:p>
          </table:table-cell>
          <table:table-cell office:value-type="float" office:value="33" calcext:value-type="float">
            <text:p>33</text:p>
          </table:table-cell>
        </table:table-row>
      </table:table>
      <table:table table:name="遺業能力番号" table:style-name="ta1">
        <table:table-column table:style-name="co19" table:default-cell-style-name="Default"/>
        <table:table-column table:style-name="co18"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10"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displayName":"</text:p>
          </table:table-cell>
          <table:table-cell office:value-type="string" calcext:value-type="string">
            <text:p>","kana":"</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rarity":</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1">,"trait"</text:span>:</text:p>
          </table:table-cell>
          <table:table-cell office:value-type="string" calcext:value-type="string">
            <text:p><text:span text:style-name="T1">,"power"</text:span>:</text:p>
          </table:table-cell>
          <table:table-cell office:value-type="string" calcext:value-type="string">
            <text:p><text:span text:style-name="T1">,"legacy"</text:span>:</text:p>
          </table:table-cell>
          <table:table-cell office:value-type="string" calcext:value-type="string">
            <text:p><text:span text:style-name="T1">,"anyNumCopies"</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named-expressions/>
      <table:database-ranges>
        <table:database-range table:name="__Anonymous_Sheet_DB__0" table:target-range-address="Sheet1.A1:Sheet1.AB502">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13P0" style:volatile="true">
      <number:text>¥</number:text>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style:map style:condition="value()&gt;=0" style:apply-style-name="N114P0"/>
    </number:number-style>
    <number:number-style style:name="N116P0" style:volatile="true">
      <number:text>¥</number:text>
      <number:number number:decimal-places="2" number:min-decimal-places="2" number:min-integer-digits="1" number:grouping="true"/>
    </number:number-style>
    <number:number-style style:name="N116">
      <number:text>-¥</number:text>
      <number:number number:decimal-places="2" number:min-decimal-places="2" number:min-integer-digits="1" number:grouping="true"/>
      <style:map style:condition="value()&gt;=0" style:apply-style-name="N116P0"/>
    </number:number-style>
    <number:number-style style:name="N117P0" style:volatile="true">
      <number:text>¥</number:text>
      <number:number number:decimal-places="2" number:min-decimal-places="2" number:min-integer-digits="1" number:grouping="true"/>
    </number:number-style>
    <number:number-style style:name="N117">
      <style:text-properties fo:color="#ff0000"/>
      <number:text>-¥</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ext>:</number:text>
      <number:seconds number:style="long"/>
    </number:time-style>
    <number:date-style style:name="N124">
      <number:year number:style="long"/>
      <number:text>/</number:text>
      <number:month number:style="long"/>
      <number:text>/</number:text>
      <number:day number:style="long"/>
      <number:text> </number:text>
      <number:hours/>
      <number:text>:</number:text>
      <number:minutes number:style="long"/>
    </number:date-style>
    <number:number-style style:name="N126P0" style:volatile="true">
      <number:text>$</number:text>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7P0" style:volatile="true">
      <number:text>$</number:text>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text>$</number:text>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number-style style:name="N130P0" style:volatile="true">
      <number:text>$</number:text>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number:text>
      <style:map style:condition="value()&gt;=0" style:apply-style-name="N130P0"/>
    </number:number-style>
    <number:date-style style:name="N131">
      <number:month number:style="long"/>
      <number:text>/</number:text>
      <number:day number:style="long"/>
      <number:text>/</number:text>
      <number:year/>
    </number:date-style>
    <number:date-style style:name="N132">
      <number:year number:style="long"/>
      <number:text>年</number:text>
      <number:month number:style="long"/>
      <number:text>月</number:text>
      <number:day number:style="long"/>
      <number:text>日</number:text>
    </number:date-style>
    <number:date-style style:name="N133">
      <number:year number:style="long"/>
      <number:text>年</number:text>
      <number:month number:style="long"/>
      <number:text>月</number:text>
    </number:date-style>
    <number:date-style style:name="N134">
      <number:month number:style="long"/>
      <number:text>月</number:text>
      <number:day number:style="long"/>
      <number:text>日</number:text>
    </number:date-style>
    <number:number-style style:name="N135P0" style:volatile="true">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number-style style:name="N136P0" style:volatile="true">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7P0" style:volatile="true">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8P0" style:volatile="true">
      <number:number number:decimal-places="2" number:min-decimal-places="2" number:min-integer-digits="1" number:grouping="true"/>
    </number:number-style>
    <number:number-style style:name="N138">
      <style:text-properties fo:color="#ff0000"/>
      <number:text>-</number:text>
      <number:number number:decimal-places="2" number:min-decimal-places="2" number:min-integer-digits="1" number:grouping="true"/>
      <style:map style:condition="value()&gt;=0" style:apply-style-name="N138P0"/>
    </number:number-style>
    <number:number-style style:name="N142P0" style:volatile="true">
      <number:text> </number:text>
      <number:fill-character> </number:fill-character>
      <number:number number:decimal-places="0" number:min-decimal-places="0" number:min-integer-digits="1" number:grouping="true"/>
      <number:text> </number:text>
    </number:number-style>
    <number:number-style style:name="N142P1" style:volatile="true">
      <number:text>-</number:text>
      <number:fill-character> </number:fill-character>
      <number:number number:decimal-places="0" number:min-decimal-places="0" number:min-integer-digits="1" number:grouping="true"/>
      <number:text> </number:text>
    </number:number-style>
    <number:number-style style:name="N142P2" style:volatile="true">
      <number:text> </number:text>
      <number:fill-character> </number: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number:text>
      <number:fill-character> </number:fill-character>
      <number:number number:decimal-places="2" number:min-decimal-places="2" number:min-integer-digits="1" number:grouping="true"/>
      <number:text> </number:text>
    </number:number-style>
    <number:number-style style:name="N150P2" style:volatile="true">
      <number:text>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number:text>
      <number:fill-character> </number:fill-character>
      <number:number number:decimal-places="2" number:min-decimal-places="2" number:min-integer-digits="1" number:grouping="true"/>
      <number:text> </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number:min-decimal-places="1" number:min-integer-digits="1" number:min-exponent-digits="1" number:exponent-interval="3" number:forced-exponent-sign="true"/>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9">0000/00/00</text:date>, <text:time style:data-style-name="N2" text:time-value="19:42:38.107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9-19T19:44:20.936000000</dc:date>
    <meta:editing-duration>PT20H28M52S</meta:editing-duration>
    <meta:editing-cycles>667</meta:editing-cycles>
    <meta:generator>LibreOffice/7.5.3.2$Windows_X86_64 LibreOffice_project/9f56dff12ba03b9acd7730a5a481eea045e468f3</meta:generator>
    <meta:document-statistic meta:table-count="9" meta:cell-count="14173" meta:object-count="0"/>
  </office:meta>
</office:document-meta>
</file>