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Noto Sans JP" svg:font-family="'Noto Sans JP'" style:font-family-generic="system" style:font-pitch="variable"/>
    <style:font-face style:name="游ゴシック" svg:font-family="游ゴシック" style:font-family-generic="system" style:font-pitch="variable"/>
  </office:font-face-decls>
  <office:automatic-styles>
    <style:style style:name="co1" style:family="table-column">
      <style:table-column-properties fo:break-before="auto" style:column-width="0.857cm"/>
    </style:style>
    <style:style style:name="co2" style:family="table-column">
      <style:table-column-properties fo:break-before="auto" style:column-width="1.069cm"/>
    </style:style>
    <style:style style:name="co3" style:family="table-column">
      <style:table-column-properties fo:break-before="auto" style:column-width="0.665cm"/>
    </style:style>
    <style:style style:name="co4" style:family="table-column">
      <style:table-column-properties fo:break-before="auto" style:column-width="7.458cm"/>
    </style:style>
    <style:style style:name="co5" style:family="table-column">
      <style:table-column-properties fo:break-before="auto" style:column-width="6.715cm"/>
    </style:style>
    <style:style style:name="co6" style:family="table-column">
      <style:table-column-properties fo:break-before="auto" style:column-width="4.232cm"/>
    </style:style>
    <style:style style:name="co7" style:family="table-column">
      <style:table-column-properties fo:break-before="auto" style:column-width="0.686cm"/>
    </style:style>
    <style:style style:name="co8" style:family="table-column">
      <style:table-column-properties fo:break-before="auto" style:column-width="0.771cm"/>
    </style:style>
    <style:style style:name="co9" style:family="table-column">
      <style:table-column-properties fo:break-before="auto" style:column-width="1.727cm"/>
    </style:style>
    <style:style style:name="co10" style:family="table-column">
      <style:table-column-properties fo:break-before="auto" style:column-width="1.005cm"/>
    </style:style>
    <style:style style:name="co11" style:family="table-column">
      <style:table-column-properties fo:break-before="auto" style:column-width="1.365cm"/>
    </style:style>
    <style:style style:name="co12" style:family="table-column">
      <style:table-column-properties fo:break-before="auto" style:column-width="1.917cm"/>
    </style:style>
    <style:style style:name="co13" style:family="table-column">
      <style:table-column-properties fo:break-before="auto" style:column-width="3.798cm"/>
    </style:style>
    <style:style style:name="co14" style:family="table-column">
      <style:table-column-properties fo:break-before="auto" style:column-width="9.495cm"/>
    </style:style>
    <style:style style:name="co15" style:family="table-column">
      <style:table-column-properties fo:break-before="auto" style:column-width="2.258cm"/>
    </style:style>
    <style:style style:name="co16" style:family="table-column">
      <style:table-column-properties fo:break-before="auto" style:column-width="0.474cm"/>
    </style:style>
    <style:style style:name="co17" style:family="table-column">
      <style:table-column-properties fo:break-before="auto" style:column-width="3.531cm"/>
    </style:style>
    <style:style style:name="co18" style:family="table-column">
      <style:table-column-properties fo:break-before="auto" style:column-width="1.175cm"/>
    </style:style>
    <style:style style:name="co19" style:family="table-column">
      <style:table-column-properties fo:break-before="auto" style:column-width="1.875cm"/>
    </style:style>
    <style:style style:name="co20" style:family="table-column">
      <style:table-column-properties fo:break-before="auto" style:column-width="1.769cm"/>
    </style:style>
    <style:style style:name="co21" style:family="table-column">
      <style:table-column-properties fo:break-before="auto" style:column-width="2.173cm"/>
    </style:style>
    <style:style style:name="co22" style:family="table-column">
      <style:table-column-properties fo:break-before="auto" style:column-width="2.152cm"/>
    </style:style>
    <style:style style:name="co23" style:family="table-column">
      <style:table-column-properties fo:break-before="auto" style:column-width="2.596cm"/>
    </style:style>
    <style:style style:name="co24" style:family="table-column">
      <style:table-column-properties fo:break-before="auto" style:column-width="2.3cm"/>
    </style:style>
    <style:style style:name="co25" style:family="table-column">
      <style:table-column-properties fo:break-before="auto" style:column-width="2.491cm"/>
    </style:style>
    <style:style style:name="co26" style:family="table-column">
      <style:table-column-properties fo:break-before="auto" style:column-width="1.579cm"/>
    </style:style>
    <style:style style:name="co27" style:family="table-column">
      <style:table-column-properties fo:break-before="auto" style:column-width="1.429cm"/>
    </style:style>
    <style:style style:name="co28" style:family="table-column">
      <style:table-column-properties fo:break-before="auto" style:column-width="1.494cm"/>
    </style:style>
    <style:style style:name="co29" style:family="table-column">
      <style:table-column-properties fo:break-before="auto" style:column-width="1.536cm"/>
    </style:style>
    <style:style style:name="co30" style:family="table-column">
      <style:table-column-properties fo:break-before="auto" style:column-width="1.471cm"/>
    </style:style>
    <style:style style:name="co31" style:family="table-column">
      <style:table-column-properties fo:break-before="auto" style:column-width="1.79cm"/>
    </style:style>
    <style:style style:name="co32" style:family="table-column">
      <style:table-column-properties fo:break-before="auto" style:column-width="2.427cm"/>
    </style:style>
    <style:style style:name="co33" style:family="table-column">
      <style:table-column-properties fo:break-before="auto" style:column-width="2.406cm"/>
    </style:style>
    <style:style style:name="co34" style:family="table-column">
      <style:table-column-properties fo:break-before="auto" style:column-width="0.517cm"/>
    </style:style>
    <style:style style:name="ro1" style:family="table-row">
      <style:table-row-properties style:row-height="2.549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44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5" style:family="table-cell" style:parent-style-name="Default">
      <style:table-cell-properties style:text-align-source="fix" style:repeat-content="false" style:rotation-angle="90" style:vertical-align="bottom"/>
      <style:paragraph-properties fo:text-align="end" fo:margin-left="0cm"/>
    </style:style>
    <style:style style:name="ce16" style:family="table-cell" style:parent-style-name="Default" style:data-style-name="N100">
      <style:table-cell-properties style:text-align-source="value-type" style:repeat-content="false" style:vertical-align="bottom"/>
      <style:paragraph-properties fo:margin-left="0cm"/>
    </style:style>
    <style:style style:name="ce6" style:family="table-cell" style:parent-style-name="Default" style:data-style-name="N100"/>
    <style:style style:name="ce18" style:family="table-cell" style:parent-style-name="Default" style:data-style-name="N0">
      <style:table-cell-properties style:text-align-source="fix" style:repeat-content="false" style:rotation-angle="90" style:vertical-align="bottom"/>
      <style:paragraph-properties fo:text-align="end" fo:margin-left="0cm"/>
    </style:style>
    <style:style style:name="ce19" style:family="table-cell" style:parent-style-name="Default" style:data-style-name="N0"/>
    <style:style style:name="ce20" style:family="table-cell" style:parent-style-name="Default">
      <style:table-cell-properties style:text-align-source="value-type" style:repeat-content="false" style:vertical-align="bottom"/>
      <style:paragraph-properties fo:margin-left="0cm"/>
    </style:style>
    <style:style style:name="ce10" style:family="table-cell" style:parent-style-name="Default">
      <style:table-cell-properties style:text-align-source="fix" style:repeat-content="false" fo:background-color="transparent" style:rotation-angle="90" style:vertical-align="bottom"/>
      <style:paragraph-properties fo:text-align="end" fo:margin-left="0cm"/>
    </style:style>
    <style:style style:name="ce11" style:family="table-cell" style:parent-style-name="Default">
      <style:table-cell-properties fo:background-color="transparent"/>
    </style:style>
    <style:style style:name="ce14" style:family="table-cell" style:parent-style-name="Default">
      <style:table-cell-properties style:text-align-source="value-type" style:repeat-content="false" style:rotation-angle="0" style:vertical-align="bottom"/>
      <style:paragraph-properties fo:margin-left="0cm"/>
    </style:style>
    <style:style style:name="ce8" style:family="table-cell" style:parent-style-name="Default">
      <style:table-cell-properties style:text-align-source="value-type" style:repeat-content="false" fo:wrap-option="wrap"/>
      <style:paragraph-properties fo:margin-left="0cm"/>
    </style:style>
    <style:style style:name="ce9" style:family="table-cell" style:parent-style-name="Default">
      <style:table-cell-properties style:text-align-source="value-type" style:repeat-content="false"/>
      <style:paragraph-properties fo:margin-left="0c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游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number-columns-repeated="2" table:default-cell-style-name="Default"/>
        <table:table-column table:style-name="co2" table:default-cell-style-name="ce6"/>
        <table:table-column table:style-name="co3" table:default-cell-style-name="ce19"/>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7" table:default-cell-style-name="Default"/>
        <table:table-column table:style-name="co9" table:default-cell-style-name="Default"/>
        <table:table-column table:style-name="co7" table:default-cell-style-name="Default"/>
        <table:table-column table:style-name="co10" table:default-cell-style-name="Default"/>
        <table:table-column table:style-name="co7" table:number-columns-repeated="2" table:default-cell-style-name="Default"/>
        <table:table-column table:style-name="co2" table:default-cell-style-name="Default"/>
        <table:table-column table:style-name="co11" table:default-cell-style-name="Default"/>
        <table:table-column table:style-name="co1" table:default-cell-style-name="Default"/>
        <table:table-column table:style-name="co12" table:default-cell-style-name="ce11"/>
        <table:table-column table:style-name="co7" table:default-cell-style-name="Default"/>
        <table:table-column table:style-name="co13" table:default-cell-style-name="Default"/>
        <table:table-column table:style-name="co13" table:default-cell-style-name="ce9"/>
        <table:table-column table:style-name="co7" table:default-cell-style-name="Default"/>
        <table:table-column table:style-name="co14" table:default-cell-style-name="Default"/>
        <table:table-column table:style-name="co15" table:number-columns-repeated="16348" table:default-cell-style-name="Default"/>
        <table:table-row table:style-name="ro1">
          <table:table-cell table:style-name="ce15" office:value-type="string" calcext:value-type="string">
            <text:p>テーブル順</text:p>
          </table:table-cell>
          <table:table-cell table:style-name="ce15" office:value-type="string" calcext:value-type="string">
            <text:p>デッキ順</text:p>
          </table:table-cell>
          <table:table-cell table:style-name="ce16" office:value-type="string" calcext:value-type="string">
            <text:p>ID</text:p>
          </table:table-cell>
          <table:table-cell table:style-name="ce18" office:value-type="string" calcext:value-type="string">
            <text:p>ローカルID</text:p>
          </table:table-cell>
          <table:table-cell table:style-name="ce20" office:value-type="string" calcext:value-type="string">
            <text:p>カード名</text:p>
          </table:table-cell>
          <table:table-cell table:style-name="ce20" office:value-type="string" calcext:value-type="string">
            <text:p>読み仮名</text:p>
          </table:table-cell>
          <table:table-cell table:style-name="ce20" office:value-type="string" calcext:value-type="string">
            <text:p>収録</text:p>
          </table:table-cell>
          <table:table-cell table:style-name="ce15" office:value-type="string" calcext:value-type="string">
            <text:p>収録番号</text:p>
          </table:table-cell>
          <table:table-cell table:style-name="ce15" office:value-type="string" calcext:value-type="string">
            <text:p>レアリティ</text:p>
          </table:table-cell>
          <table:table-cell table:style-name="ce15" office:value-type="string" calcext:value-type="string">
            <text:p>レアリティ番号</text:p>
          </table:table-cell>
          <table:table-cell table:style-name="ce20" office:value-type="string" calcext:value-type="string">
            <text:p>種類</text:p>
          </table:table-cell>
          <table:table-cell table:style-name="ce15" office:value-type="string" calcext:value-type="string">
            <text:p>種類番号</text:p>
          </table:table-cell>
          <table:table-cell table:style-name="ce20" office:value-type="string" calcext:value-type="string">
            <text:p>色</text:p>
          </table:table-cell>
          <table:table-cell table:style-name="ce15" office:value-type="string" calcext:value-type="string">
            <text:p>色番号</text:p>
          </table:table-cell>
          <table:table-cell table:style-name="ce15" office:value-type="string" calcext:value-type="string">
            <text:p>レベル</text:p>
          </table:table-cell>
          <table:table-cell table:style-name="ce15" office:value-type="string" calcext:value-type="string">
            <text:p>魔力コスト</text:p>
          </table:table-cell>
          <table:table-cell table:style-name="ce15" office:value-type="string" calcext:value-type="string">
            <text:p>能力語</text:p>
          </table:table-cell>
          <table:table-cell table:style-name="ce15" office:value-type="string" calcext:value-type="string">
            <text:p>能力語番号</text:p>
          </table:table-cell>
          <table:table-cell table:style-name="ce10" office:value-type="string" calcext:value-type="string">
            <text:p>特性</text:p>
          </table:table-cell>
          <table:table-cell table:style-name="ce15" office:value-type="string" calcext:value-type="string">
            <text:p>特性番号</text:p>
          </table:table-cell>
          <table:table-cell table:style-name="ce14" office:value-type="string" calcext:value-type="string">
            <text:p>ルールテキスト</text:p>
          </table:table-cell>
          <table:table-cell table:style-name="ce15" office:value-type="string" calcext:value-type="string">
            <text:p>遺業能力</text:p>
          </table:table-cell>
          <table:table-cell table:style-name="ce15" office:value-type="string" calcext:value-type="string">
            <text:p>遺業能力番号</text:p>
          </table:table-cell>
          <table:table-cell office:value-type="string" calcext:value-type="string">
            <text:p>画像URL</text:p>
          </table:table-cell>
          <table:table-cell table:style-name="ce20" office:value-type="string" calcext:value-type="string">
            <text:p>JSON</text:p>
          </table:table-cell>
          <table:table-cell table:style-name="ce20" table:number-columns-repeated="16347"/>
        </table:table-row>
        <table:table-row table:style-name="ro2">
          <table:table-cell office:value-type="float" office:value="1" calcext:value-type="float">
            <text:p>1</text:p>
          </table:table-cell>
          <table:table-cell office:value-type="float" office:value="180" calcext:value-type="float">
            <text:p>180</text:p>
          </table:table-cell>
          <table:table-cell office:value-type="string" calcext:value-type="string">
            <text:p>R-1</text:p>
          </table:table-cell>
          <table:table-cell office:value-type="float" office:value="1" calcext:value-type="float">
            <text:p>1</text:p>
          </table:table-cell>
          <table:table-cell office:value-type="string" calcext:value-type="string">
            <text:p>上杉謙信</text:p>
          </table:table-cell>
          <table:table-cell office:value-type="string" calcext:value-type="string">
            <text:p>うえすぎけんしん</text:p>
          </table:table-cell>
          <table:table-cell office:value-type="string" calcext:value-type="string">
            <text:p>伝説の武将デッキ</text:p>
          </table:table-cell>
          <table:table-cell table:formula="of:=VLOOKUP([.G2];[$収録番号.$A$1:$収録番号.$B$9];2;0)" office:value-type="float" office:value="10" calcext:value-type="float">
            <text:p>10</text:p>
          </table:table-cell>
          <table:table-cell office:value-type="string" calcext:value-type="string">
            <text:p>SR</text:p>
          </table:table-cell>
          <table:table-cell table:formula="of:=VLOOKUP([.I2];[$レアリティ番号.$A$1:$レアリティ番号.$B$4];2;0)" office:value-type="float" office:value="4" calcext:value-type="float">
            <text:p>4</text:p>
          </table:table-cell>
          <table:table-cell office:value-type="string" calcext:value-type="string">
            <text:p>イジン</text:p>
          </table:table-cell>
          <table:table-cell table:formula="of:=VLOOKUP([.K2];[$種類番号.$A$1:$種類番号.$B$4];2;0)" office:value-type="float" office:value="1" calcext:value-type="float">
            <text:p>1</text:p>
          </table:table-cell>
          <table:table-cell office:value-type="string" calcext:value-type="string">
            <text:p>赤</text:p>
          </table:table-cell>
          <table:table-cell table:formula="of:=VLOOKUP([.M2];[$色番号.$A$1:$色番号.$B$10];2;0)" office:value-type="float" office:value="1" calcext:value-type="float">
            <text:p>1</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能力語番号.$A$1:$能力語番号.$B$10];2;0);0)" office:value-type="float" office:value="0" calcext:value-type="float">
            <text:p>0</text:p>
          </table:table-cell>
          <table:table-cell office:value-type="string" calcext:value-type="string">
            <text:p>剣術</text:p>
          </table:table-cell>
          <table:table-cell table:formula="of:=IFERROR(VLOOKUP([.$S2];[$特性番号.$A$1:$特性番号.$B$8];2;0);0)" office:value-type="float" office:value="1" calcext:value-type="float">
            <text:p>1</text:p>
          </table:table-cell>
          <table:table-cell office:value-type="string" calcext:value-type="string">
            <text:p>アタッカーになったとき、これのパワー以下のパワーを持つ相手の戦場のイジン1体を破壊する。</text:p>
          </table:table-cell>
          <table:table-cell table:style-name="ce8" table:formula="of:=NA()" office:value-type="string" office:string-value="" calcext:value-type="error">
            <text:p>#N/A</text:p>
          </table:table-cell>
          <table:table-cell table:formula="of:=IFERROR(VLOOKUP([.$V2];[$遺業能力番号.$A$1:$遺業能力番号.$B$9];2;0);0)" office:value-type="float" office:value="0" calcext:value-type="float">
            <text:p>0</text:p>
          </table:table-cell>
          <table:table-cell office:value-type="string" calcext:value-type="string">
            <text:p>https://one-draw.jp/ijinden/cardlist/R01/card/R_001.png</text:p>
          </table:table-cell>
          <table:table-cell table:formula="of:=CONCATENATE([$JSON.$A$1];[.$C2];[$JSON.$B$1];[.$E2];[$JSON.$C$1];[.$F2];[$JSON.$D$1];IF(ISNA([.$S2]);&quot;null&quot;;&quot;&quot;&quot;&quot;&amp;[.$S2]&amp;&quot;&quot;&quot;&quot;);[$JSON.$E$1];[.$U2];[$JSON.$F$1];IF(ISNA([.$V2]);&quot;null&quot;;&quot;&quot;&quot;&quot;&amp;[.$V2]&amp;&quot;&quot;&quot;&quot;);[$JSON.$G$1];[.$X2];[$JSON.$H$1];[.$H2];[$JSON.$I$1];[.J2];[$JSON.$J$1];[.$L2];[$JSON.$K$1];[.$O2];[$JSON.$L$1];[.$N2];[$JSON.$M$1];[.$R2];[$JSON.$N$1];[.$T2];[$JSON.$O$1];[.$W2];[$JSON.$P$1];[.$A2];[$JSON.$Q$1];[.$B2];[$JSON.$R$1])" office:value-type="string" office:string-value="{&quot;id&quot;:&quot;R-1&quot;,&quot;name&quot;:&quot;上杉謙信&quot;,&quot;kana&quot;:&quot;うえすぎけんしん&quot;,&quot;traitText&quot;:&quot;剣術&quot;,&quot;ruleText&quot;:&quot;アタッカーになったとき、これのパワー以下のパワーを持つ相手の戦場のイジン1体を破壊する。&quot;,&quot;legacyText&quot;:null,&quot;imageUrl&quot;:&quot;https://one-draw.jp/ijinden/cardlist/R01/card/R_001.png&quot;,&quot;expansion&quot;:10,&quot;rarity&quot;:4,&quot;type&quot;:1,&quot;level&quot;:6,&quot;color&quot;:1,&quot;term&quot;:0,&quot;trait&quot;:1,&quot;legacy&quot;:0,&quot;orderTable&quot;:1,&quot;orderDeck&quot;:180}," calcext:value-type="string">
            <text:p>{"id":"R-1","name":"上杉謙信","kana":"うえすぎけんしん","traitText":"剣術","ruleText":"アタッカーになったとき、これのパワー以下のパワーを持つ相手の戦場のイジン1体を破壊する。","legacyText":null,"imageUrl":"https://one-draw.jp/ijinden/cardlist/R01/card/R_001.png","expansion":10,"rarity":4,"type":1,"level":6,"color":1,"term":0,"trait":1,"legacy":0,"orderTable":1,"orderDeck":180},</text:p>
          </table:table-cell>
          <table:table-cell table:number-columns-repeated="16347"/>
        </table:table-row>
        <table:table-row table:style-name="ro2">
          <table:table-cell office:value-type="float" office:value="2" calcext:value-type="float">
            <text:p>2</text:p>
          </table:table-cell>
          <table:table-cell office:value-type="float" office:value="1" calcext:value-type="float">
            <text:p>1</text:p>
          </table:table-cell>
          <table:table-cell office:value-type="string" calcext:value-type="string">
            <text:p>R-2</text:p>
          </table:table-cell>
          <table:table-cell office:value-type="float" office:value="2" calcext:value-type="float">
            <text:p>2</text:p>
          </table:table-cell>
          <table:table-cell office:value-type="string" calcext:value-type="string">
            <text:p>源義経</text:p>
          </table:table-cell>
          <table:table-cell office:value-type="string" calcext:value-type="string">
            <text:p>みなもとのよしつね</text:p>
          </table:table-cell>
          <table:table-cell office:value-type="string" calcext:value-type="string">
            <text:p>伝説の武将デッキ</text:p>
          </table:table-cell>
          <table:table-cell table:formula="of:=VLOOKUP([.G3];[$収録番号.$A$1:$収録番号.$B$9];2;0)" office:value-type="float" office:value="10" calcext:value-type="float">
            <text:p>10</text:p>
          </table:table-cell>
          <table:table-cell office:value-type="string" calcext:value-type="string">
            <text:p>N</text:p>
          </table:table-cell>
          <table:table-cell table:formula="of:=VLOOKUP([.I3];[$レアリティ番号.$A$1:$レアリティ番号.$B$4];2;0)" office:value-type="float" office:value="1" calcext:value-type="float">
            <text:p>1</text:p>
          </table:table-cell>
          <table:table-cell office:value-type="string" calcext:value-type="string">
            <text:p>イジン</text:p>
          </table:table-cell>
          <table:table-cell table:formula="of:=VLOOKUP([.K3];[$種類番号.$A$1:$種類番号.$B$4];2;0)" office:value-type="float" office:value="1" calcext:value-type="float">
            <text:p>1</text:p>
          </table:table-cell>
          <table:table-cell office:value-type="string" calcext:value-type="string">
            <text:p>赤</text:p>
          </table:table-cell>
          <table:table-cell table:formula="of:=VLOOKUP([.M3];[$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能力語番号.$A$1:$能力語番号.$B$10];2;0);0)" office:value-type="float" office:value="0" calcext:value-type="float">
            <text:p>0</text:p>
          </table:table-cell>
          <table:table-cell office:value-type="string" calcext:value-type="string">
            <text:p>剣術</text:p>
          </table:table-cell>
          <table:table-cell table:formula="of:=IFERROR(VLOOKUP([.$S3];[$特性番号.$A$1:$特性番号.$B$8];2;0);0)" office:value-type="float" office:value="1" calcext:value-type="float">
            <text:p>1</text:p>
          </table:table-cell>
          <table:table-cell office:value-type="string" calcext:value-type="string">
            <text:p>即応</text:p>
          </table:table-cell>
          <table:table-cell table:style-name="ce8" office:value-type="string" calcext:value-type="string">
            <text:p>魔力化</text:p>
          </table:table-cell>
          <table:table-cell table:formula="of:=IFERROR(VLOOKUP([.$V3];[$遺業能力番号.$A$1:$遺業能力番号.$B$9];2;0);0)" office:value-type="float" office:value="1" calcext:value-type="float">
            <text:p>1</text:p>
          </table:table-cell>
          <table:table-cell office:value-type="string" calcext:value-type="string">
            <text:p>https://one-draw.jp/ijinden/cardlist/R01/card/R_002.png</text:p>
          </table:table-cell>
          <table:table-cell table:formula="of:=CONCATENATE([$JSON.$A$1];[.$C3];[$JSON.$B$1];[.$E3];[$JSON.$C$1];[.$F3];[$JSON.$D$1];IF(ISNA([.$S3]);&quot;null&quot;;&quot;&quot;&quot;&quot;&amp;[.$S3]&amp;&quot;&quot;&quot;&quot;);[$JSON.$E$1];[.$U3];[$JSON.$F$1];IF(ISNA([.$V3]);&quot;null&quot;;&quot;&quot;&quot;&quot;&amp;[.$V3]&amp;&quot;&quot;&quot;&quot;);[$JSON.$G$1];[.$X3];[$JSON.$H$1];[.$H3];[$JSON.$I$1];[.J3];[$JSON.$J$1];[.$L3];[$JSON.$K$1];[.$O3];[$JSON.$L$1];[.$N3];[$JSON.$M$1];[.$R3];[$JSON.$N$1];[.$T3];[$JSON.$O$1];[.$W3];[$JSON.$P$1];[.$A3];[$JSON.$Q$1];[.$B3];[$JSON.$R$1])" office:value-type="string" office:string-value="{&quot;id&quot;:&quot;R-2&quot;,&quot;name&quot;:&quot;源義経&quot;,&quot;kana&quot;:&quot;みなもとのよしつね&quot;,&quot;traitText&quot;:&quot;剣術&quot;,&quot;ruleText&quot;:&quot;即応&quot;,&quot;legacyText&quot;:&quot;魔力化&quot;,&quot;imageUrl&quot;:&quot;https://one-draw.jp/ijinden/cardlist/R01/card/R_002.png&quot;,&quot;expansion&quot;:10,&quot;rarity&quot;:1,&quot;type&quot;:1,&quot;level&quot;:1,&quot;color&quot;:1,&quot;term&quot;:0,&quot;trait&quot;:1,&quot;legacy&quot;:1,&quot;orderTable&quot;:2,&quot;orderDeck&quot;:1}," calcext:value-type="string">
            <text:p>{"id":"R-2","name":"源義経","kana":"みなもとのよしつね","traitText":"剣術","ruleText":"即応","legacyText":"魔力化","imageUrl":"https://one-draw.jp/ijinden/cardlist/R01/card/R_002.png","expansion":10,"rarity":1,"type":1,"level":1,"color":1,"term":0,"trait":1,"legacy":1,"orderTable":2,"orderDeck":1},</text:p>
          </table:table-cell>
          <table:table-cell table:number-columns-repeated="16347"/>
        </table:table-row>
        <table:table-row table:style-name="ro2">
          <table:table-cell office:value-type="float" office:value="3" calcext:value-type="float">
            <text:p>3</text:p>
          </table:table-cell>
          <table:table-cell office:value-type="float" office:value="24" calcext:value-type="float">
            <text:p>24</text:p>
          </table:table-cell>
          <table:table-cell office:value-type="string" calcext:value-type="string">
            <text:p>R-3</text:p>
          </table:table-cell>
          <table:table-cell office:value-type="float" office:value="3" calcext:value-type="float">
            <text:p>3</text:p>
          </table:table-cell>
          <table:table-cell office:value-type="string" calcext:value-type="string">
            <text:p>武田勝頼</text:p>
          </table:table-cell>
          <table:table-cell office:value-type="string" calcext:value-type="string">
            <text:p>たけだかつより</text:p>
          </table:table-cell>
          <table:table-cell office:value-type="string" calcext:value-type="string">
            <text:p>伝説の武将デッキ</text:p>
          </table:table-cell>
          <table:table-cell table:formula="of:=VLOOKUP([.G4];[$収録番号.$A$1:$収録番号.$B$9];2;0)" office:value-type="float" office:value="10" calcext:value-type="float">
            <text:p>10</text:p>
          </table:table-cell>
          <table:table-cell office:value-type="string" calcext:value-type="string">
            <text:p>N</text:p>
          </table:table-cell>
          <table:table-cell table:formula="of:=VLOOKUP([.I4];[$レアリティ番号.$A$1:$レアリティ番号.$B$4];2;0)" office:value-type="float" office:value="1" calcext:value-type="float">
            <text:p>1</text:p>
          </table:table-cell>
          <table:table-cell office:value-type="string" calcext:value-type="string">
            <text:p>イジン</text:p>
          </table:table-cell>
          <table:table-cell table:formula="of:=VLOOKUP([.K4];[$種類番号.$A$1:$種類番号.$B$4];2;0)" office:value-type="float" office:value="1" calcext:value-type="float">
            <text:p>1</text:p>
          </table:table-cell>
          <table:table-cell office:value-type="string" calcext:value-type="string">
            <text:p>赤</text:p>
          </table:table-cell>
          <table:table-cell table:formula="of:=VLOOKUP([.M4];[$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4];[$能力語番号.$A$1:$能力語番号.$B$10];2;0);0)" office:value-type="float" office:value="0" calcext:value-type="float">
            <text:p>0</text:p>
          </table:table-cell>
          <table:table-cell office:value-type="string" calcext:value-type="string">
            <text:p>剣術</text:p>
          </table:table-cell>
          <table:table-cell table:formula="of:=IFERROR(VLOOKUP([.$S4];[$特性番号.$A$1:$特性番号.$B$8];2;0);0)" office:value-type="float" office:value="1" calcext:value-type="float">
            <text:p>1</text:p>
          </table:table-cell>
          <table:table-cell office:value-type="string" calcext:value-type="string">
            <text:p>アタック+2000</text:p>
          </table:table-cell>
          <table:table-cell table:style-name="ce8" office:value-type="string" calcext:value-type="string">
            <text:p>1ドローする</text:p>
          </table:table-cell>
          <table:table-cell table:formula="of:=IFERROR(VLOOKUP([.$V4];[$遺業能力番号.$A$1:$遺業能力番号.$B$9];2;0);0)" office:value-type="float" office:value="4" calcext:value-type="float">
            <text:p>4</text:p>
          </table:table-cell>
          <table:table-cell office:value-type="string" calcext:value-type="string">
            <text:p>https://one-draw.jp/ijinden/cardlist/R01/card/R_003.png</text:p>
          </table:table-cell>
          <table:table-cell table:formula="of:=CONCATENATE([$JSON.$A$1];[.$C4];[$JSON.$B$1];[.$E4];[$JSON.$C$1];[.$F4];[$JSON.$D$1];IF(ISNA([.$S4]);&quot;null&quot;;&quot;&quot;&quot;&quot;&amp;[.$S4]&amp;&quot;&quot;&quot;&quot;);[$JSON.$E$1];[.$U4];[$JSON.$F$1];IF(ISNA([.$V4]);&quot;null&quot;;&quot;&quot;&quot;&quot;&amp;[.$V4]&amp;&quot;&quot;&quot;&quot;);[$JSON.$G$1];[.$X4];[$JSON.$H$1];[.$H4];[$JSON.$I$1];[.J4];[$JSON.$J$1];[.$L4];[$JSON.$K$1];[.$O4];[$JSON.$L$1];[.$N4];[$JSON.$M$1];[.$R4];[$JSON.$N$1];[.$T4];[$JSON.$O$1];[.$W4];[$JSON.$P$1];[.$A4];[$JSON.$Q$1];[.$B4];[$JSON.$R$1])" office:value-type="string" office:string-value="{&quot;id&quot;:&quot;R-3&quot;,&quot;name&quot;:&quot;武田勝頼&quot;,&quot;kana&quot;:&quot;たけだかつより&quot;,&quot;traitText&quot;:&quot;剣術&quot;,&quot;ruleText&quot;:&quot;アタック+2000&quot;,&quot;legacyText&quot;:&quot;1ドローする&quot;,&quot;imageUrl&quot;:&quot;https://one-draw.jp/ijinden/cardlist/R01/card/R_003.png&quot;,&quot;expansion&quot;:10,&quot;rarity&quot;:1,&quot;type&quot;:1,&quot;level&quot;:2,&quot;color&quot;:1,&quot;term&quot;:0,&quot;trait&quot;:1,&quot;legacy&quot;:4,&quot;orderTable&quot;:3,&quot;orderDeck&quot;:24}," calcext:value-type="string">
            <text:p>{"id":"R-3","name":"武田勝頼","kana":"たけだかつより","traitText":"剣術","ruleText":"アタック+2000","legacyText":"1ドローする","imageUrl":"https://one-draw.jp/ijinden/cardlist/R01/card/R_003.png","expansion":10,"rarity":1,"type":1,"level":2,"color":1,"term":0,"trait":1,"legacy":4,"orderTable":3,"orderDeck":24},</text:p>
          </table:table-cell>
          <table:table-cell table:number-columns-repeated="16347"/>
        </table:table-row>
        <table:table-row table:style-name="ro2">
          <table:table-cell office:value-type="float" office:value="4" calcext:value-type="float">
            <text:p>4</text:p>
          </table:table-cell>
          <table:table-cell office:value-type="float" office:value="63" calcext:value-type="float">
            <text:p>63</text:p>
          </table:table-cell>
          <table:table-cell office:value-type="string" calcext:value-type="string">
            <text:p>R-4</text:p>
          </table:table-cell>
          <table:table-cell office:value-type="float" office:value="4" calcext:value-type="float">
            <text:p>4</text:p>
          </table:table-cell>
          <table:table-cell office:value-type="string" calcext:value-type="string">
            <text:p>ヴラド・ツェペシュ</text:p>
          </table:table-cell>
          <table:table-cell office:value-type="string" calcext:value-type="string">
            <text:p>ゔらどつぇぺしゅ</text:p>
          </table:table-cell>
          <table:table-cell office:value-type="string" calcext:value-type="string">
            <text:p>伝説の武将デッキ</text:p>
          </table:table-cell>
          <table:table-cell table:formula="of:=VLOOKUP([.G5];[$収録番号.$A$1:$収録番号.$B$9];2;0)" office:value-type="float" office:value="10" calcext:value-type="float">
            <text:p>10</text:p>
          </table:table-cell>
          <table:table-cell office:value-type="string" calcext:value-type="string">
            <text:p>N</text:p>
          </table:table-cell>
          <table:table-cell table:formula="of:=VLOOKUP([.I5];[$レアリティ番号.$A$1:$レアリティ番号.$B$4];2;0)" office:value-type="float" office:value="1" calcext:value-type="float">
            <text:p>1</text:p>
          </table:table-cell>
          <table:table-cell office:value-type="string" calcext:value-type="string">
            <text:p>イジン</text:p>
          </table:table-cell>
          <table:table-cell table:formula="of:=VLOOKUP([.K5];[$種類番号.$A$1:$種類番号.$B$4];2;0)" office:value-type="float" office:value="1" calcext:value-type="float">
            <text:p>1</text:p>
          </table:table-cell>
          <table:table-cell office:value-type="string" calcext:value-type="string">
            <text:p>赤</text:p>
          </table:table-cell>
          <table:table-cell table:formula="of:=VLOOKUP([.M5];[$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5];[$特性番号.$A$1:$特性番号.$B$8];2;0);0)" office:value-type="float" office:value="0" calcext:value-type="float">
            <text:p>0</text:p>
          </table:table-cell>
          <table:table-cell office:value-type="string" calcext:value-type="string">
            <text:p>アタッカーになったとき、自分の魔力ゾーンのマリョク1つを裏にして発動できる。パワー2000以下の相手の戦場のイジン1体を破壊する。</text:p>
          </table:table-cell>
          <table:table-cell table:style-name="ce8" table:formula="of:=NA()" office:value-type="string" office:string-value="" calcext:value-type="error">
            <text:p>#N/A</text:p>
          </table:table-cell>
          <table:table-cell table:formula="of:=IFERROR(VLOOKUP([.$V5];[$遺業能力番号.$A$1:$遺業能力番号.$B$9];2;0);0)" office:value-type="float" office:value="0" calcext:value-type="float">
            <text:p>0</text:p>
          </table:table-cell>
          <table:table-cell office:value-type="string" calcext:value-type="string">
            <text:p>https://one-draw.jp/ijinden/cardlist/R01/card/R_004.png</text:p>
          </table:table-cell>
          <table:table-cell table:formula="of:=CONCATENATE([$JSON.$A$1];[.$C5];[$JSON.$B$1];[.$E5];[$JSON.$C$1];[.$F5];[$JSON.$D$1];IF(ISNA([.$S5]);&quot;null&quot;;&quot;&quot;&quot;&quot;&amp;[.$S5]&amp;&quot;&quot;&quot;&quot;);[$JSON.$E$1];[.$U5];[$JSON.$F$1];IF(ISNA([.$V5]);&quot;null&quot;;&quot;&quot;&quot;&quot;&amp;[.$V5]&amp;&quot;&quot;&quot;&quot;);[$JSON.$G$1];[.$X5];[$JSON.$H$1];[.$H5];[$JSON.$I$1];[.J5];[$JSON.$J$1];[.$L5];[$JSON.$K$1];[.$O5];[$JSON.$L$1];[.$N5];[$JSON.$M$1];[.$R5];[$JSON.$N$1];[.$T5];[$JSON.$O$1];[.$W5];[$JSON.$P$1];[.$A5];[$JSON.$Q$1];[.$B5];[$JSON.$R$1])" office:value-type="string" office:string-value="{&quot;id&quot;:&quot;R-4&quot;,&quot;name&quot;:&quot;ヴラド・ツェペシュ&quot;,&quot;kana&quot;:&quot;ゔらどつぇぺしゅ&quot;,&quot;traitText&quot;:null,&quot;ruleText&quot;:&quot;アタッカーになったとき、自分の魔力ゾーンのマリョク1つを裏にして発動できる。パワー2000以下の相手の戦場のイジン1体を破壊する。&quot;,&quot;legacyText&quot;:null,&quot;imageUrl&quot;:&quot;https://one-draw.jp/ijinden/cardlist/R01/card/R_004.png&quot;,&quot;expansion&quot;:10,&quot;rarity&quot;:1,&quot;type&quot;:1,&quot;level&quot;:3,&quot;color&quot;:1,&quot;term&quot;:0,&quot;trait&quot;:0,&quot;legacy&quot;:0,&quot;orderTable&quot;:4,&quot;orderDeck&quot;:63}," calcext:value-type="string">
            <text:p>{"id":"R-4","name":"ヴラド・ツェペシュ","kana":"ゔらどつぇぺしゅ","traitText":null,"ruleText":"アタッカーになったとき、自分の魔力ゾーンのマリョク1つを裏にして発動できる。パワー2000以下の相手の戦場のイジン1体を破壊する。","legacyText":null,"imageUrl":"https://one-draw.jp/ijinden/cardlist/R01/card/R_004.png","expansion":10,"rarity":1,"type":1,"level":3,"color":1,"term":0,"trait":0,"legacy":0,"orderTable":4,"orderDeck":63},</text:p>
          </table:table-cell>
          <table:table-cell table:number-columns-repeated="16347"/>
        </table:table-row>
        <table:table-row table:style-name="ro2">
          <table:table-cell office:value-type="float" office:value="5" calcext:value-type="float">
            <text:p>5</text:p>
          </table:table-cell>
          <table:table-cell office:value-type="float" office:value="106" calcext:value-type="float">
            <text:p>106</text:p>
          </table:table-cell>
          <table:table-cell office:value-type="string" calcext:value-type="string">
            <text:p>R-5</text:p>
          </table:table-cell>
          <table:table-cell office:value-type="float" office:value="5" calcext:value-type="float">
            <text:p>5</text:p>
          </table:table-cell>
          <table:table-cell office:value-type="string" calcext:value-type="string">
            <text:p>坂上田村麻呂</text:p>
          </table:table-cell>
          <table:table-cell office:value-type="string" calcext:value-type="string">
            <text:p>さかのうえのたむらまろ</text:p>
          </table:table-cell>
          <table:table-cell office:value-type="string" calcext:value-type="string">
            <text:p>伝説の武将デッキ</text:p>
          </table:table-cell>
          <table:table-cell table:formula="of:=VLOOKUP([.G6];[$収録番号.$A$1:$収録番号.$B$9];2;0)" office:value-type="float" office:value="10" calcext:value-type="float">
            <text:p>10</text:p>
          </table:table-cell>
          <table:table-cell office:value-type="string" calcext:value-type="string">
            <text:p>N</text:p>
          </table:table-cell>
          <table:table-cell table:formula="of:=VLOOKUP([.I6];[$レアリティ番号.$A$1:$レアリティ番号.$B$4];2;0)" office:value-type="float" office:value="1" calcext:value-type="float">
            <text:p>1</text:p>
          </table:table-cell>
          <table:table-cell office:value-type="string" calcext:value-type="string">
            <text:p>イジン</text:p>
          </table:table-cell>
          <table:table-cell table:formula="of:=VLOOKUP([.K6];[$種類番号.$A$1:$種類番号.$B$4];2;0)" office:value-type="float" office:value="1" calcext:value-type="float">
            <text:p>1</text:p>
          </table:table-cell>
          <table:table-cell office:value-type="string" calcext:value-type="string">
            <text:p>赤</text:p>
          </table:table-cell>
          <table:table-cell table:formula="of:=VLOOKUP([.M6];[$色番号.$A$1:$色番号.$B$10];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6];[$能力語番号.$A$1:$能力語番号.$B$10];2;0);0)" office:value-type="float" office:value="0" calcext:value-type="float">
            <text:p>0</text:p>
          </table:table-cell>
          <table:table-cell office:value-type="string" calcext:value-type="string">
            <text:p>剣術</text:p>
          </table:table-cell>
          <table:table-cell table:formula="of:=IFERROR(VLOOKUP([.$S6];[$特性番号.$A$1:$特性番号.$B$8];2;0);0)" office:value-type="float" office:value="1" calcext:value-type="float">
            <text:p>1</text:p>
          </table:table-cell>
          <table:table-cell office:value-type="string" calcext:value-type="string">
            <text:p>ダブルプレッシャー</text:p>
          </table:table-cell>
          <table:table-cell table:style-name="ce8" table:formula="of:=NA()" office:value-type="string" office:string-value="" calcext:value-type="error">
            <text:p>#N/A</text:p>
          </table:table-cell>
          <table:table-cell table:formula="of:=IFERROR(VLOOKUP([.$V6];[$遺業能力番号.$A$1:$遺業能力番号.$B$9];2;0);0)" office:value-type="float" office:value="0" calcext:value-type="float">
            <text:p>0</text:p>
          </table:table-cell>
          <table:table-cell office:value-type="string" calcext:value-type="string">
            <text:p>https://one-draw.jp/ijinden/cardlist/R01/card/R_005.png</text:p>
          </table:table-cell>
          <table:table-cell table:formula="of:=CONCATENATE([$JSON.$A$1];[.$C6];[$JSON.$B$1];[.$E6];[$JSON.$C$1];[.$F6];[$JSON.$D$1];IF(ISNA([.$S6]);&quot;null&quot;;&quot;&quot;&quot;&quot;&amp;[.$S6]&amp;&quot;&quot;&quot;&quot;);[$JSON.$E$1];[.$U6];[$JSON.$F$1];IF(ISNA([.$V6]);&quot;null&quot;;&quot;&quot;&quot;&quot;&amp;[.$V6]&amp;&quot;&quot;&quot;&quot;);[$JSON.$G$1];[.$X6];[$JSON.$H$1];[.$H6];[$JSON.$I$1];[.J6];[$JSON.$J$1];[.$L6];[$JSON.$K$1];[.$O6];[$JSON.$L$1];[.$N6];[$JSON.$M$1];[.$R6];[$JSON.$N$1];[.$T6];[$JSON.$O$1];[.$W6];[$JSON.$P$1];[.$A6];[$JSON.$Q$1];[.$B6];[$JSON.$R$1])" office:value-type="string" office:string-value="{&quot;id&quot;:&quot;R-5&quot;,&quot;name&quot;:&quot;坂上田村麻呂&quot;,&quot;kana&quot;:&quot;さかのうえのたむらまろ&quot;,&quot;traitText&quot;:&quot;剣術&quot;,&quot;ruleText&quot;:&quot;ダブルプレッシャー&quot;,&quot;legacyText&quot;:null,&quot;imageUrl&quot;:&quot;https://one-draw.jp/ijinden/cardlist/R01/card/R_005.png&quot;,&quot;expansion&quot;:10,&quot;rarity&quot;:1,&quot;type&quot;:1,&quot;level&quot;:4,&quot;color&quot;:1,&quot;term&quot;:0,&quot;trait&quot;:1,&quot;legacy&quot;:0,&quot;orderTable&quot;:5,&quot;orderDeck&quot;:106}," calcext:value-type="string">
            <text:p>{"id":"R-5","name":"坂上田村麻呂","kana":"さかのうえのたむらまろ","traitText":"剣術","ruleText":"ダブルプレッシャー","legacyText":null,"imageUrl":"https://one-draw.jp/ijinden/cardlist/R01/card/R_005.png","expansion":10,"rarity":1,"type":1,"level":4,"color":1,"term":0,"trait":1,"legacy":0,"orderTable":5,"orderDeck":106},</text:p>
          </table:table-cell>
          <table:table-cell table:number-columns-repeated="16347"/>
        </table:table-row>
        <table:table-row table:style-name="ro2">
          <table:table-cell office:value-type="float" office:value="6" calcext:value-type="float">
            <text:p>6</text:p>
          </table:table-cell>
          <table:table-cell office:value-type="float" office:value="143" calcext:value-type="float">
            <text:p>143</text:p>
          </table:table-cell>
          <table:table-cell office:value-type="string" calcext:value-type="string">
            <text:p>R-6</text:p>
          </table:table-cell>
          <table:table-cell office:value-type="float" office:value="6" calcext:value-type="float">
            <text:p>6</text:p>
          </table:table-cell>
          <table:table-cell office:value-type="string" calcext:value-type="string">
            <text:p>楠木正成</text:p>
          </table:table-cell>
          <table:table-cell office:value-type="string" calcext:value-type="string">
            <text:p>くすのきまさしげ</text:p>
          </table:table-cell>
          <table:table-cell office:value-type="string" calcext:value-type="string">
            <text:p>伝説の武将デッキ</text:p>
          </table:table-cell>
          <table:table-cell table:formula="of:=VLOOKUP([.G7];[$収録番号.$A$1:$収録番号.$B$9];2;0)" office:value-type="float" office:value="10" calcext:value-type="float">
            <text:p>10</text:p>
          </table:table-cell>
          <table:table-cell office:value-type="string" calcext:value-type="string">
            <text:p>N</text:p>
          </table:table-cell>
          <table:table-cell table:formula="of:=VLOOKUP([.I7];[$レアリティ番号.$A$1:$レアリティ番号.$B$4];2;0)" office:value-type="float" office:value="1" calcext:value-type="float">
            <text:p>1</text:p>
          </table:table-cell>
          <table:table-cell office:value-type="string" calcext:value-type="string">
            <text:p>イジン</text:p>
          </table:table-cell>
          <table:table-cell table:formula="of:=VLOOKUP([.K7];[$種類番号.$A$1:$種類番号.$B$4];2;0)" office:value-type="float" office:value="1" calcext:value-type="float">
            <text:p>1</text:p>
          </table:table-cell>
          <table:table-cell office:value-type="string" calcext:value-type="string">
            <text:p>赤</text:p>
          </table:table-cell>
          <table:table-cell table:formula="of:=VLOOKUP([.M7];[$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7];[$能力語番号.$A$1:$能力語番号.$B$10];2;0);0)" office:value-type="float" office:value="0" calcext:value-type="float">
            <text:p>0</text:p>
          </table:table-cell>
          <table:table-cell office:value-type="string" calcext:value-type="string">
            <text:p>剣術</text:p>
          </table:table-cell>
          <table:table-cell table:formula="of:=IFERROR(VLOOKUP([.$S7];[$特性番号.$A$1:$特性番号.$B$8];2;0);0)" office:value-type="float" office:value="1" calcext:value-type="float">
            <text:p>1</text:p>
          </table:table-cell>
          <table:table-cell office:value-type="string" calcext:value-type="string">
            <text:p>戦場に置かれたとき、イジン召喚権+1する。</text:p>
          </table:table-cell>
          <table:table-cell table:style-name="ce8" table:formula="of:=NA()" office:value-type="string" office:string-value="" calcext:value-type="error">
            <text:p>#N/A</text:p>
          </table:table-cell>
          <table:table-cell table:formula="of:=IFERROR(VLOOKUP([.$V7];[$遺業能力番号.$A$1:$遺業能力番号.$B$9];2;0);0)" office:value-type="float" office:value="0" calcext:value-type="float">
            <text:p>0</text:p>
          </table:table-cell>
          <table:table-cell office:value-type="string" calcext:value-type="string">
            <text:p>https://one-draw.jp/ijinden/cardlist/R01/card/R_006.png</text:p>
          </table:table-cell>
          <table:table-cell table:formula="of:=CONCATENATE([$JSON.$A$1];[.$C7];[$JSON.$B$1];[.$E7];[$JSON.$C$1];[.$F7];[$JSON.$D$1];IF(ISNA([.$S7]);&quot;null&quot;;&quot;&quot;&quot;&quot;&amp;[.$S7]&amp;&quot;&quot;&quot;&quot;);[$JSON.$E$1];[.$U7];[$JSON.$F$1];IF(ISNA([.$V7]);&quot;null&quot;;&quot;&quot;&quot;&quot;&amp;[.$V7]&amp;&quot;&quot;&quot;&quot;);[$JSON.$G$1];[.$X7];[$JSON.$H$1];[.$H7];[$JSON.$I$1];[.J7];[$JSON.$J$1];[.$L7];[$JSON.$K$1];[.$O7];[$JSON.$L$1];[.$N7];[$JSON.$M$1];[.$R7];[$JSON.$N$1];[.$T7];[$JSON.$O$1];[.$W7];[$JSON.$P$1];[.$A7];[$JSON.$Q$1];[.$B7];[$JSON.$R$1])" office:value-type="string" office:string-value="{&quot;id&quot;:&quot;R-6&quot;,&quot;name&quot;:&quot;楠木正成&quot;,&quot;kana&quot;:&quot;くすのきまさしげ&quot;,&quot;traitText&quot;:&quot;剣術&quot;,&quot;ruleText&quot;:&quot;戦場に置かれたとき、イジン召喚権+1する。&quot;,&quot;legacyText&quot;:null,&quot;imageUrl&quot;:&quot;https://one-draw.jp/ijinden/cardlist/R01/card/R_006.png&quot;,&quot;expansion&quot;:10,&quot;rarity&quot;:1,&quot;type&quot;:1,&quot;level&quot;:5,&quot;color&quot;:1,&quot;term&quot;:0,&quot;trait&quot;:1,&quot;legacy&quot;:0,&quot;orderTable&quot;:6,&quot;orderDeck&quot;:143}," calcext:value-type="string">
            <text:p>{"id":"R-6","name":"楠木正成","kana":"くすのきまさしげ","traitText":"剣術","ruleText":"戦場に置かれたとき、イジン召喚権+1する。","legacyText":null,"imageUrl":"https://one-draw.jp/ijinden/cardlist/R01/card/R_006.png","expansion":10,"rarity":1,"type":1,"level":5,"color":1,"term":0,"trait":1,"legacy":0,"orderTable":6,"orderDeck":143},</text:p>
          </table:table-cell>
          <table:table-cell table:number-columns-repeated="16347"/>
        </table:table-row>
        <table:table-row table:style-name="ro2">
          <table:table-cell office:value-type="float" office:value="7" calcext:value-type="float">
            <text:p>7</text:p>
          </table:table-cell>
          <table:table-cell office:value-type="float" office:value="144" calcext:value-type="float">
            <text:p>144</text:p>
          </table:table-cell>
          <table:table-cell office:value-type="string" calcext:value-type="string">
            <text:p>R-7</text:p>
          </table:table-cell>
          <table:table-cell office:value-type="float" office:value="7" calcext:value-type="float">
            <text:p>7</text:p>
          </table:table-cell>
          <table:table-cell office:value-type="string" calcext:value-type="string">
            <text:p>ジェームズ・バトラー・ヒコック</text:p>
          </table:table-cell>
          <table:table-cell office:value-type="string" calcext:value-type="string">
            <text:p>じぇーむずばとらーひこっく</text:p>
          </table:table-cell>
          <table:table-cell office:value-type="string" calcext:value-type="string">
            <text:p>伝説の武将デッキ</text:p>
          </table:table-cell>
          <table:table-cell table:formula="of:=VLOOKUP([.G8];[$収録番号.$A$1:$収録番号.$B$9];2;0)" office:value-type="float" office:value="10" calcext:value-type="float">
            <text:p>10</text:p>
          </table:table-cell>
          <table:table-cell office:value-type="string" calcext:value-type="string">
            <text:p>N</text:p>
          </table:table-cell>
          <table:table-cell table:formula="of:=VLOOKUP([.I8];[$レアリティ番号.$A$1:$レアリティ番号.$B$4];2;0)" office:value-type="float" office:value="1" calcext:value-type="float">
            <text:p>1</text:p>
          </table:table-cell>
          <table:table-cell office:value-type="string" calcext:value-type="string">
            <text:p>イジン</text:p>
          </table:table-cell>
          <table:table-cell table:formula="of:=VLOOKUP([.K8];[$種類番号.$A$1:$種類番号.$B$4];2;0)" office:value-type="float" office:value="1" calcext:value-type="float">
            <text:p>1</text:p>
          </table:table-cell>
          <table:table-cell office:value-type="string" calcext:value-type="string">
            <text:p>赤</text:p>
          </table:table-cell>
          <table:table-cell table:formula="of:=VLOOKUP([.M8];[$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8];[$特性番号.$A$1:$特性番号.$B$8];2;0);0)" office:value-type="float" office:value="0" calcext:value-type="float">
            <text:p>0</text:p>
          </table:table-cell>
          <table:table-cell office:value-type="string" calcext:value-type="string">
            <text:p>即応¶アタッカーになったとき、相手の戦場のハイケイ1つにつき1ドローする。</text:p>
          </table:table-cell>
          <table:table-cell table:style-name="ce8" table:formula="of:=NA()" office:value-type="string" office:string-value="" calcext:value-type="error">
            <text:p>#N/A</text:p>
          </table:table-cell>
          <table:table-cell table:formula="of:=IFERROR(VLOOKUP([.$V8];[$遺業能力番号.$A$1:$遺業能力番号.$B$9];2;0);0)" office:value-type="float" office:value="0" calcext:value-type="float">
            <text:p>0</text:p>
          </table:table-cell>
          <table:table-cell office:value-type="string" calcext:value-type="string">
            <text:p>https://one-draw.jp/ijinden/cardlist/R01/card/R_007.png</text:p>
          </table:table-cell>
          <table:table-cell table:formula="of:=CONCATENATE([$JSON.$A$1];[.$C8];[$JSON.$B$1];[.$E8];[$JSON.$C$1];[.$F8];[$JSON.$D$1];IF(ISNA([.$S8]);&quot;null&quot;;&quot;&quot;&quot;&quot;&amp;[.$S8]&amp;&quot;&quot;&quot;&quot;);[$JSON.$E$1];[.$U8];[$JSON.$F$1];IF(ISNA([.$V8]);&quot;null&quot;;&quot;&quot;&quot;&quot;&amp;[.$V8]&amp;&quot;&quot;&quot;&quot;);[$JSON.$G$1];[.$X8];[$JSON.$H$1];[.$H8];[$JSON.$I$1];[.J8];[$JSON.$J$1];[.$L8];[$JSON.$K$1];[.$O8];[$JSON.$L$1];[.$N8];[$JSON.$M$1];[.$R8];[$JSON.$N$1];[.$T8];[$JSON.$O$1];[.$W8];[$JSON.$P$1];[.$A8];[$JSON.$Q$1];[.$B8];[$JSON.$R$1])" office:value-type="string" office:string-value="{&quot;id&quot;:&quot;R-7&quot;,&quot;name&quot;:&quot;ジェームズ・バトラー・ヒコック&quot;,&quot;kana&quot;:&quot;じぇーむずばとらーひこっく&quot;,&quot;traitText&quot;:null,&quot;ruleText&quot;:&quot;即応¶アタッカーになったとき、相手の戦場のハイケイ1つにつき1ドローする。&quot;,&quot;legacyText&quot;:null,&quot;imageUrl&quot;:&quot;https://one-draw.jp/ijinden/cardlist/R01/card/R_007.png&quot;,&quot;expansion&quot;:10,&quot;rarity&quot;:1,&quot;type&quot;:1,&quot;level&quot;:5,&quot;color&quot;:1,&quot;term&quot;:0,&quot;trait&quot;:0,&quot;legacy&quot;:0,&quot;orderTable&quot;:7,&quot;orderDeck&quot;:144}," calcext:value-type="string">
            <text:p>{"id":"R-7","name":"ジェームズ・バトラー・ヒコック","kana":"じぇーむずばとらーひこっく","traitText":null,"ruleText":"即応¶アタッカーになったとき、相手の戦場のハイケイ1つにつき1ドローする。","legacyText":null,"imageUrl":"https://one-draw.jp/ijinden/cardlist/R01/card/R_007.png","expansion":10,"rarity":1,"type":1,"level":5,"color":1,"term":0,"trait":0,"legacy":0,"orderTable":7,"orderDeck":144},</text:p>
          </table:table-cell>
          <table:table-cell table:number-columns-repeated="16347"/>
        </table:table-row>
        <table:table-row table:style-name="ro2">
          <table:table-cell office:value-type="float" office:value="8" calcext:value-type="float">
            <text:p>8</text:p>
          </table:table-cell>
          <table:table-cell office:value-type="float" office:value="181" calcext:value-type="float">
            <text:p>181</text:p>
          </table:table-cell>
          <table:table-cell office:value-type="string" calcext:value-type="string">
            <text:p>R-8</text:p>
          </table:table-cell>
          <table:table-cell office:value-type="float" office:value="8" calcext:value-type="float">
            <text:p>8</text:p>
          </table:table-cell>
          <table:table-cell office:value-type="string" calcext:value-type="string">
            <text:p>アレクサンドロス大王</text:p>
          </table:table-cell>
          <table:table-cell office:value-type="string" calcext:value-type="string">
            <text:p>あれくさんどろすだいおう</text:p>
          </table:table-cell>
          <table:table-cell office:value-type="string" calcext:value-type="string">
            <text:p>伝説の武将デッキ</text:p>
          </table:table-cell>
          <table:table-cell table:formula="of:=VLOOKUP([.G9];[$収録番号.$A$1:$収録番号.$B$9];2;0)" office:value-type="float" office:value="10" calcext:value-type="float">
            <text:p>10</text:p>
          </table:table-cell>
          <table:table-cell office:value-type="string" calcext:value-type="string">
            <text:p>N</text:p>
          </table:table-cell>
          <table:table-cell table:formula="of:=VLOOKUP([.I9];[$レアリティ番号.$A$1:$レアリティ番号.$B$4];2;0)" office:value-type="float" office:value="1" calcext:value-type="float">
            <text:p>1</text:p>
          </table:table-cell>
          <table:table-cell office:value-type="string" calcext:value-type="string">
            <text:p>イジン</text:p>
          </table:table-cell>
          <table:table-cell table:formula="of:=VLOOKUP([.K9];[$種類番号.$A$1:$種類番号.$B$4];2;0)" office:value-type="float" office:value="1" calcext:value-type="float">
            <text:p>1</text:p>
          </table:table-cell>
          <table:table-cell office:value-type="string" calcext:value-type="string">
            <text:p>赤</text:p>
          </table:table-cell>
          <table:table-cell table:formula="of:=VLOOKUP([.M9];[$色番号.$A$1:$色番号.$B$10];2;0)" office:value-type="float" office:value="1" calcext:value-type="float">
            <text:p>1</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9];[$特性番号.$A$1:$特性番号.$B$8];2;0);0)" office:value-type="float" office:value="0" calcext:value-type="float">
            <text:p>0</text:p>
          </table:table-cell>
          <table:table-cell office:value-type="string" calcext:value-type="string">
            <text:p>即応¶アタッカーになったとき、アタッカー1体につき相手の戦場のハイケイ1つを破壊する。</text:p>
          </table:table-cell>
          <table:table-cell table:style-name="ce8" table:formula="of:=NA()" office:value-type="string" office:string-value="" calcext:value-type="error">
            <text:p>#N/A</text:p>
          </table:table-cell>
          <table:table-cell table:formula="of:=IFERROR(VLOOKUP([.$V9];[$遺業能力番号.$A$1:$遺業能力番号.$B$9];2;0);0)" office:value-type="float" office:value="0" calcext:value-type="float">
            <text:p>0</text:p>
          </table:table-cell>
          <table:table-cell office:value-type="string" calcext:value-type="string">
            <text:p>https://one-draw.jp/ijinden/cardlist/R01/card/R_008.png</text:p>
          </table:table-cell>
          <table:table-cell table:formula="of:=CONCATENATE([$JSON.$A$1];[.$C9];[$JSON.$B$1];[.$E9];[$JSON.$C$1];[.$F9];[$JSON.$D$1];IF(ISNA([.$S9]);&quot;null&quot;;&quot;&quot;&quot;&quot;&amp;[.$S9]&amp;&quot;&quot;&quot;&quot;);[$JSON.$E$1];[.$U9];[$JSON.$F$1];IF(ISNA([.$V9]);&quot;null&quot;;&quot;&quot;&quot;&quot;&amp;[.$V9]&amp;&quot;&quot;&quot;&quot;);[$JSON.$G$1];[.$X9];[$JSON.$H$1];[.$H9];[$JSON.$I$1];[.J9];[$JSON.$J$1];[.$L9];[$JSON.$K$1];[.$O9];[$JSON.$L$1];[.$N9];[$JSON.$M$1];[.$R9];[$JSON.$N$1];[.$T9];[$JSON.$O$1];[.$W9];[$JSON.$P$1];[.$A9];[$JSON.$Q$1];[.$B9];[$JSON.$R$1])" office:value-type="string" office:string-value="{&quot;id&quot;:&quot;R-8&quot;,&quot;name&quot;:&quot;アレクサンドロス大王&quot;,&quot;kana&quot;:&quot;あれくさんどろすだいおう&quot;,&quot;traitText&quot;:null,&quot;ruleText&quot;:&quot;即応¶アタッカーになったとき、アタッカー1体につき相手の戦場のハイケイ1つを破壊する。&quot;,&quot;legacyText&quot;:null,&quot;imageUrl&quot;:&quot;https://one-draw.jp/ijinden/cardlist/R01/card/R_008.png&quot;,&quot;expansion&quot;:10,&quot;rarity&quot;:1,&quot;type&quot;:1,&quot;level&quot;:6,&quot;color&quot;:1,&quot;term&quot;:0,&quot;trait&quot;:0,&quot;legacy&quot;:0,&quot;orderTable&quot;:8,&quot;orderDeck&quot;:181}," calcext:value-type="string">
            <text:p>{"id":"R-8","name":"アレクサンドロス大王","kana":"あれくさんどろすだいおう","traitText":null,"ruleText":"即応¶アタッカーになったとき、アタッカー1体につき相手の戦場のハイケイ1つを破壊する。","legacyText":null,"imageUrl":"https://one-draw.jp/ijinden/cardlist/R01/card/R_008.png","expansion":10,"rarity":1,"type":1,"level":6,"color":1,"term":0,"trait":0,"legacy":0,"orderTable":8,"orderDeck":181},</text:p>
          </table:table-cell>
          <table:table-cell table:number-columns-repeated="16347"/>
        </table:table-row>
        <table:table-row table:style-name="ro2">
          <table:table-cell office:value-type="float" office:value="9" calcext:value-type="float">
            <text:p>9</text:p>
          </table:table-cell>
          <table:table-cell office:value-type="float" office:value="239" calcext:value-type="float">
            <text:p>239</text:p>
          </table:table-cell>
          <table:table-cell office:value-type="string" calcext:value-type="string">
            <text:p>R-9</text:p>
          </table:table-cell>
          <table:table-cell office:value-type="float" office:value="9" calcext:value-type="float">
            <text:p>9</text:p>
          </table:table-cell>
          <table:table-cell office:value-type="string" calcext:value-type="string">
            <text:p>神剣眠る氏社</text:p>
          </table:table-cell>
          <table:table-cell office:value-type="string" calcext:value-type="string">
            <text:p>しんけんねむるうじしゃ</text:p>
          </table:table-cell>
          <table:table-cell office:value-type="string" calcext:value-type="string">
            <text:p>伝説の武将デッキ</text:p>
          </table:table-cell>
          <table:table-cell table:formula="of:=VLOOKUP([.G10];[$収録番号.$A$1:$収録番号.$B$9];2;0)" office:value-type="float" office:value="10" calcext:value-type="float">
            <text:p>10</text:p>
          </table:table-cell>
          <table:table-cell office:value-type="string" calcext:value-type="string">
            <text:p>N</text:p>
          </table:table-cell>
          <table:table-cell table:formula="of:=VLOOKUP([.I10];[$レアリティ番号.$A$1:$レアリティ番号.$B$4];2;0)" office:value-type="float" office:value="1" calcext:value-type="float">
            <text:p>1</text:p>
          </table:table-cell>
          <table:table-cell office:value-type="string" calcext:value-type="string">
            <text:p>ハイケイ</text:p>
          </table:table-cell>
          <table:table-cell table:formula="of:=VLOOKUP([.K10];[$種類番号.$A$1:$種類番号.$B$4];2;0)" office:value-type="float" office:value="2" calcext:value-type="float">
            <text:p>2</text:p>
          </table:table-cell>
          <table:table-cell office:value-type="string" calcext:value-type="string">
            <text:p>赤</text:p>
          </table:table-cell>
          <table:table-cell table:formula="of:=VLOOKUP([.M10];[$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0];[$特性番号.$A$1:$特性番号.$B$8];2;0);0)" office:value-type="float" office:value="0" calcext:value-type="float">
            <text:p>0</text:p>
          </table:table-cell>
          <table:table-cell office:value-type="string" calcext:value-type="string">
            <text:p>自分の戦場の赤のイジンが破壊されるたびに発動できる。そのイジン1体を裏にして魔力ゾーンに置く。</text:p>
          </table:table-cell>
          <table:table-cell table:style-name="ce8" office:value-type="string" calcext:value-type="string">
            <text:p>魔力化</text:p>
          </table:table-cell>
          <table:table-cell table:formula="of:=IFERROR(VLOOKUP([.$V10];[$遺業能力番号.$A$1:$遺業能力番号.$B$9];2;0);0)" office:value-type="float" office:value="1" calcext:value-type="float">
            <text:p>1</text:p>
          </table:table-cell>
          <table:table-cell office:value-type="string" calcext:value-type="string">
            <text:p>https://one-draw.jp/ijinden/cardlist/R01/card/R_009.png</text:p>
          </table:table-cell>
          <table:table-cell table:formula="of:=CONCATENATE([$JSON.$A$1];[.$C10];[$JSON.$B$1];[.$E10];[$JSON.$C$1];[.$F10];[$JSON.$D$1];IF(ISNA([.$S10]);&quot;null&quot;;&quot;&quot;&quot;&quot;&amp;[.$S10]&amp;&quot;&quot;&quot;&quot;);[$JSON.$E$1];[.$U10];[$JSON.$F$1];IF(ISNA([.$V10]);&quot;null&quot;;&quot;&quot;&quot;&quot;&amp;[.$V10]&amp;&quot;&quot;&quot;&quot;);[$JSON.$G$1];[.$X10];[$JSON.$H$1];[.$H10];[$JSON.$I$1];[.J10];[$JSON.$J$1];[.$L10];[$JSON.$K$1];[.$O10];[$JSON.$L$1];[.$N10];[$JSON.$M$1];[.$R10];[$JSON.$N$1];[.$T10];[$JSON.$O$1];[.$W10];[$JSON.$P$1];[.$A10];[$JSON.$Q$1];[.$B10];[$JSON.$R$1])" office:value-type="string" office:string-value="{&quot;id&quot;:&quot;R-9&quot;,&quot;name&quot;:&quot;神剣眠る氏社&quot;,&quot;kana&quot;:&quot;しんけんねむるうじしゃ&quot;,&quot;traitText&quot;:null,&quot;ruleText&quot;:&quot;自分の戦場の赤のイジンが破壊されるたびに発動できる。そのイジン1体を裏にして魔力ゾーンに置く。&quot;,&quot;legacyText&quot;:&quot;魔力化&quot;,&quot;imageUrl&quot;:&quot;https://one-draw.jp/ijinden/cardlist/R01/card/R_009.png&quot;,&quot;expansion&quot;:10,&quot;rarity&quot;:1,&quot;type&quot;:2,&quot;level&quot;:2,&quot;color&quot;:1,&quot;term&quot;:0,&quot;trait&quot;:0,&quot;legacy&quot;:1,&quot;orderTable&quot;:9,&quot;orderDeck&quot;:239}," calcext:value-type="string">
            <text:p>{"id":"R-9","name":"神剣眠る氏社","kana":"しんけんねむるうじしゃ","traitText":null,"ruleText":"自分の戦場の赤のイジンが破壊されるたびに発動できる。そのイジン1体を裏にして魔力ゾーンに置く。","legacyText":"魔力化","imageUrl":"https://one-draw.jp/ijinden/cardlist/R01/card/R_009.png","expansion":10,"rarity":1,"type":2,"level":2,"color":1,"term":0,"trait":0,"legacy":1,"orderTable":9,"orderDeck":239},</text:p>
          </table:table-cell>
          <table:table-cell table:number-columns-repeated="16347"/>
        </table:table-row>
        <table:table-row table:style-name="ro2">
          <table:table-cell office:value-type="float" office:value="10" calcext:value-type="float">
            <text:p>10</text:p>
          </table:table-cell>
          <table:table-cell office:value-type="float" office:value="248" calcext:value-type="float">
            <text:p>248</text:p>
          </table:table-cell>
          <table:table-cell office:value-type="string" calcext:value-type="string">
            <text:p>R-10</text:p>
          </table:table-cell>
          <table:table-cell office:value-type="float" office:value="10" calcext:value-type="float">
            <text:p>10</text:p>
          </table:table-cell>
          <table:table-cell office:value-type="string" calcext:value-type="string">
            <text:p>連なる天守閣</text:p>
          </table:table-cell>
          <table:table-cell office:value-type="string" calcext:value-type="string">
            <text:p>つらなるてんしゅかく</text:p>
          </table:table-cell>
          <table:table-cell office:value-type="string" calcext:value-type="string">
            <text:p>伝説の武将デッキ</text:p>
          </table:table-cell>
          <table:table-cell table:formula="of:=VLOOKUP([.G11];[$収録番号.$A$1:$収録番号.$B$9];2;0)" office:value-type="float" office:value="10" calcext:value-type="float">
            <text:p>10</text:p>
          </table:table-cell>
          <table:table-cell office:value-type="string" calcext:value-type="string">
            <text:p>N</text:p>
          </table:table-cell>
          <table:table-cell table:formula="of:=VLOOKUP([.I11];[$レアリティ番号.$A$1:$レアリティ番号.$B$4];2;0)" office:value-type="float" office:value="1" calcext:value-type="float">
            <text:p>1</text:p>
          </table:table-cell>
          <table:table-cell office:value-type="string" calcext:value-type="string">
            <text:p>ハイケイ</text:p>
          </table:table-cell>
          <table:table-cell table:formula="of:=VLOOKUP([.K11];[$種類番号.$A$1:$種類番号.$B$4];2;0)" office:value-type="float" office:value="2" calcext:value-type="float">
            <text:p>2</text:p>
          </table:table-cell>
          <table:table-cell office:value-type="string" calcext:value-type="string">
            <text:p>赤</text:p>
          </table:table-cell>
          <table:table-cell table:formula="of:=VLOOKUP([.M11];[$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1];[$特性番号.$A$1:$特性番号.$B$8];2;0);0)" office:value-type="float" office:value="0" calcext:value-type="float">
            <text:p>0</text:p>
          </table:table-cell>
          <table:table-cell office:value-type="string" calcext:value-type="string">
            <text:p>これのハイケイ使用に際し、自分の戦場に「剣術」イジンがいれば、これはレベル1になる。¶これが戦場にある間、自分の戦場のイジンは「パワー+1000」を得る。</text:p>
          </table:table-cell>
          <table:table-cell table:style-name="ce8" office:value-type="string" calcext:value-type="string">
            <text:p>魔力化</text:p>
          </table:table-cell>
          <table:table-cell table:formula="of:=IFERROR(VLOOKUP([.$V11];[$遺業能力番号.$A$1:$遺業能力番号.$B$9];2;0);0)" office:value-type="float" office:value="1" calcext:value-type="float">
            <text:p>1</text:p>
          </table:table-cell>
          <table:table-cell office:value-type="string" calcext:value-type="string">
            <text:p>https://one-draw.jp/ijinden/cardlist/R01/card/R_010.png</text:p>
          </table:table-cell>
          <table:table-cell table:formula="of:=CONCATENATE([$JSON.$A$1];[.$C11];[$JSON.$B$1];[.$E11];[$JSON.$C$1];[.$F11];[$JSON.$D$1];IF(ISNA([.$S11]);&quot;null&quot;;&quot;&quot;&quot;&quot;&amp;[.$S11]&amp;&quot;&quot;&quot;&quot;);[$JSON.$E$1];[.$U11];[$JSON.$F$1];IF(ISNA([.$V11]);&quot;null&quot;;&quot;&quot;&quot;&quot;&amp;[.$V11]&amp;&quot;&quot;&quot;&quot;);[$JSON.$G$1];[.$X11];[$JSON.$H$1];[.$H11];[$JSON.$I$1];[.J11];[$JSON.$J$1];[.$L11];[$JSON.$K$1];[.$O11];[$JSON.$L$1];[.$N11];[$JSON.$M$1];[.$R11];[$JSON.$N$1];[.$T11];[$JSON.$O$1];[.$W11];[$JSON.$P$1];[.$A11];[$JSON.$Q$1];[.$B11];[$JSON.$R$1])" office:value-type="string" office:string-value="{&quot;id&quot;:&quot;R-10&quot;,&quot;name&quot;:&quot;連なる天守閣&quot;,&quot;kana&quot;:&quot;つらなるてんしゅかく&quot;,&quot;traitText&quot;:null,&quot;ruleText&quot;:&quot;これのハイケイ使用に際し、自分の戦場に「剣術」イジンがいれば、これはレベル1になる。¶これが戦場にある間、自分の戦場のイジンは「パワー+1000」を得る。&quot;,&quot;legacyText&quot;:&quot;魔力化&quot;,&quot;imageUrl&quot;:&quot;https://one-draw.jp/ijinden/cardlist/R01/card/R_010.png&quot;,&quot;expansion&quot;:10,&quot;rarity&quot;:1,&quot;type&quot;:2,&quot;level&quot;:3,&quot;color&quot;:1,&quot;term&quot;:0,&quot;trait&quot;:0,&quot;legacy&quot;:1,&quot;orderTable&quot;:10,&quot;orderDeck&quot;:248}," calcext:value-type="string">
            <text:p>{"id":"R-10","name":"連なる天守閣","kana":"つらなるてんしゅかく","traitText":null,"ruleText":"これのハイケイ使用に際し、自分の戦場に「剣術」イジンがいれば、これはレベル1になる。¶これが戦場にある間、自分の戦場のイジンは「パワー+1000」を得る。","legacyText":"魔力化","imageUrl":"https://one-draw.jp/ijinden/cardlist/R01/card/R_010.png","expansion":10,"rarity":1,"type":2,"level":3,"color":1,"term":0,"trait":0,"legacy":1,"orderTable":10,"orderDeck":248},</text:p>
          </table:table-cell>
          <table:table-cell table:number-columns-repeated="16347"/>
        </table:table-row>
        <table:table-row table:style-name="ro2">
          <table:table-cell office:value-type="float" office:value="11" calcext:value-type="float">
            <text:p>11</text:p>
          </table:table-cell>
          <table:table-cell office:value-type="float" office:value="304" calcext:value-type="float">
            <text:p>304</text:p>
          </table:table-cell>
          <table:table-cell office:value-type="string" calcext:value-type="string">
            <text:p>R-11</text:p>
          </table:table-cell>
          <table:table-cell office:value-type="float" office:value="11" calcext:value-type="float">
            <text:p>11</text:p>
          </table:table-cell>
          <table:table-cell office:value-type="string" calcext:value-type="string">
            <text:p>ロイヤリティ</text:p>
          </table:table-cell>
          <table:table-cell office:value-type="string" calcext:value-type="string">
            <text:p>ろいやりてぃ</text:p>
          </table:table-cell>
          <table:table-cell office:value-type="string" calcext:value-type="string">
            <text:p>伝説の武将デッキ</text:p>
          </table:table-cell>
          <table:table-cell table:formula="of:=VLOOKUP([.G12];[$収録番号.$A$1:$収録番号.$B$9];2;0)" office:value-type="float" office:value="10" calcext:value-type="float">
            <text:p>10</text:p>
          </table:table-cell>
          <table:table-cell office:value-type="string" calcext:value-type="string">
            <text:p>N</text:p>
          </table:table-cell>
          <table:table-cell table:formula="of:=VLOOKUP([.I12];[$レアリティ番号.$A$1:$レアリティ番号.$B$4];2;0)" office:value-type="float" office:value="1" calcext:value-type="float">
            <text:p>1</text:p>
          </table:table-cell>
          <table:table-cell office:value-type="string" calcext:value-type="string">
            <text:p>マホウ</text:p>
          </table:table-cell>
          <table:table-cell table:formula="of:=VLOOKUP([.K12];[$種類番号.$A$1:$種類番号.$B$4];2;0)" office:value-type="float" office:value="3" calcext:value-type="float">
            <text:p>3</text:p>
          </table:table-cell>
          <table:table-cell office:value-type="string" calcext:value-type="string">
            <text:p>赤</text:p>
          </table:table-cell>
          <table:table-cell table:formula="of:=VLOOKUP([.M12];[$色番号.$A$1:$色番号.$B$10];2;0)"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1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2];[$特性番号.$A$1:$特性番号.$B$8];2;0);0)" office:value-type="float" office:value="0" calcext:value-type="float">
            <text:p>0</text:p>
          </table:table-cell>
          <table:table-cell office:value-type="string" calcext:value-type="string">
            <text:p>自分の戦場の「剣術」イジン1体を破壊するか、自分の戦場のガーディアン1体を山札の上に戻す。3ドローする。</text:p>
          </table:table-cell>
          <table:table-cell table:style-name="ce8" office:value-type="string" calcext:value-type="string">
            <text:p>冥府発動</text:p>
          </table:table-cell>
          <table:table-cell table:formula="of:=IFERROR(VLOOKUP([.$V12];[$遺業能力番号.$A$1:$遺業能力番号.$B$9];2;0);0)" office:value-type="float" office:value="2" calcext:value-type="float">
            <text:p>2</text:p>
          </table:table-cell>
          <table:table-cell office:value-type="string" calcext:value-type="string">
            <text:p>https://one-draw.jp/ijinden/cardlist/R01/card/R_011.png</text:p>
          </table:table-cell>
          <table:table-cell table:formula="of:=CONCATENATE([$JSON.$A$1];[.$C12];[$JSON.$B$1];[.$E12];[$JSON.$C$1];[.$F12];[$JSON.$D$1];IF(ISNA([.$S12]);&quot;null&quot;;&quot;&quot;&quot;&quot;&amp;[.$S12]&amp;&quot;&quot;&quot;&quot;);[$JSON.$E$1];[.$U12];[$JSON.$F$1];IF(ISNA([.$V12]);&quot;null&quot;;&quot;&quot;&quot;&quot;&amp;[.$V12]&amp;&quot;&quot;&quot;&quot;);[$JSON.$G$1];[.$X12];[$JSON.$H$1];[.$H12];[$JSON.$I$1];[.J12];[$JSON.$J$1];[.$L12];[$JSON.$K$1];[.$O12];[$JSON.$L$1];[.$N12];[$JSON.$M$1];[.$R12];[$JSON.$N$1];[.$T12];[$JSON.$O$1];[.$W12];[$JSON.$P$1];[.$A12];[$JSON.$Q$1];[.$B12];[$JSON.$R$1])" office:value-type="string" office:string-value="{&quot;id&quot;:&quot;R-11&quot;,&quot;name&quot;:&quot;ロイヤリティ&quot;,&quot;kana&quot;:&quot;ろいやりてぃ&quot;,&quot;traitText&quot;:null,&quot;ruleText&quot;:&quot;自分の戦場の「剣術」イジン1体を破壊するか、自分の戦場のガーディアン1体を山札の上に戻す。3ドローする。&quot;,&quot;legacyText&quot;:&quot;冥府発動&quot;,&quot;imageUrl&quot;:&quot;https://one-draw.jp/ijinden/cardlist/R01/card/R_011.png&quot;,&quot;expansion&quot;:10,&quot;rarity&quot;:1,&quot;type&quot;:3,&quot;level&quot;:3,&quot;color&quot;:1,&quot;term&quot;:0,&quot;trait&quot;:0,&quot;legacy&quot;:2,&quot;orderTable&quot;:11,&quot;orderDeck&quot;:304}," calcext:value-type="string">
            <text:p>{"id":"R-11","name":"ロイヤリティ","kana":"ろいやりてぃ","traitText":null,"ruleText":"自分の戦場の「剣術」イジン1体を破壊するか、自分の戦場のガーディアン1体を山札の上に戻す。3ドローする。","legacyText":"冥府発動","imageUrl":"https://one-draw.jp/ijinden/cardlist/R01/card/R_011.png","expansion":10,"rarity":1,"type":3,"level":3,"color":1,"term":0,"trait":0,"legacy":2,"orderTable":11,"orderDeck":304},</text:p>
          </table:table-cell>
          <table:table-cell table:number-columns-repeated="16347"/>
        </table:table-row>
        <table:table-row table:style-name="ro2">
          <table:table-cell office:value-type="float" office:value="12" calcext:value-type="float">
            <text:p>12</text:p>
          </table:table-cell>
          <table:table-cell office:value-type="float" office:value="305" calcext:value-type="float">
            <text:p>305</text:p>
          </table:table-cell>
          <table:table-cell office:value-type="string" calcext:value-type="string">
            <text:p>R-12</text:p>
          </table:table-cell>
          <table:table-cell office:value-type="float" office:value="12" calcext:value-type="float">
            <text:p>12</text:p>
          </table:table-cell>
          <table:table-cell office:value-type="string" calcext:value-type="string">
            <text:p>デスペラード</text:p>
          </table:table-cell>
          <table:table-cell office:value-type="string" calcext:value-type="string">
            <text:p>ですぺらーど</text:p>
          </table:table-cell>
          <table:table-cell office:value-type="string" calcext:value-type="string">
            <text:p>伝説の武将デッキ</text:p>
          </table:table-cell>
          <table:table-cell table:formula="of:=VLOOKUP([.G13];[$収録番号.$A$1:$収録番号.$B$9];2;0)" office:value-type="float" office:value="10" calcext:value-type="float">
            <text:p>10</text:p>
          </table:table-cell>
          <table:table-cell office:value-type="string" calcext:value-type="string">
            <text:p>N</text:p>
          </table:table-cell>
          <table:table-cell table:formula="of:=VLOOKUP([.I13];[$レアリティ番号.$A$1:$レアリティ番号.$B$4];2;0)" office:value-type="float" office:value="1" calcext:value-type="float">
            <text:p>1</text:p>
          </table:table-cell>
          <table:table-cell office:value-type="string" calcext:value-type="string">
            <text:p>マホウ</text:p>
          </table:table-cell>
          <table:table-cell table:formula="of:=VLOOKUP([.K13];[$種類番号.$A$1:$種類番号.$B$4];2;0)" office:value-type="float" office:value="3" calcext:value-type="float">
            <text:p>3</text:p>
          </table:table-cell>
          <table:table-cell office:value-type="string" calcext:value-type="string">
            <text:p>赤</text:p>
          </table:table-cell>
          <table:table-cell table:formula="of:=VLOOKUP([.M13];[$色番号.$A$1:$色番号.$B$10];2;0)"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1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3];[$特性番号.$A$1:$特性番号.$B$8];2;0);0)" office:value-type="float" office:value="0" calcext:value-type="float">
            <text:p>0</text:p>
          </table:table-cell>
          <table:table-cell office:value-type="string" calcext:value-type="string">
            <text:p>自分の戦場のイジン1体と相手の戦場のガーディアン1体を指定して発動できる。そのイジンとガーディアンを破壊する。</text:p>
          </table:table-cell>
          <table:table-cell table:style-name="ce8" office:value-type="string" calcext:value-type="string">
            <text:p>冥府発動</text:p>
          </table:table-cell>
          <table:table-cell table:formula="of:=IFERROR(VLOOKUP([.$V13];[$遺業能力番号.$A$1:$遺業能力番号.$B$9];2;0);0)" office:value-type="float" office:value="2" calcext:value-type="float">
            <text:p>2</text:p>
          </table:table-cell>
          <table:table-cell office:value-type="string" calcext:value-type="string">
            <text:p>https://one-draw.jp/ijinden/cardlist/R01/card/R_012.png</text:p>
          </table:table-cell>
          <table:table-cell table:formula="of:=CONCATENATE([$JSON.$A$1];[.$C13];[$JSON.$B$1];[.$E13];[$JSON.$C$1];[.$F13];[$JSON.$D$1];IF(ISNA([.$S13]);&quot;null&quot;;&quot;&quot;&quot;&quot;&amp;[.$S13]&amp;&quot;&quot;&quot;&quot;);[$JSON.$E$1];[.$U13];[$JSON.$F$1];IF(ISNA([.$V13]);&quot;null&quot;;&quot;&quot;&quot;&quot;&amp;[.$V13]&amp;&quot;&quot;&quot;&quot;);[$JSON.$G$1];[.$X13];[$JSON.$H$1];[.$H13];[$JSON.$I$1];[.J13];[$JSON.$J$1];[.$L13];[$JSON.$K$1];[.$O13];[$JSON.$L$1];[.$N13];[$JSON.$M$1];[.$R13];[$JSON.$N$1];[.$T13];[$JSON.$O$1];[.$W13];[$JSON.$P$1];[.$A13];[$JSON.$Q$1];[.$B13];[$JSON.$R$1])" office:value-type="string" office:string-value="{&quot;id&quot;:&quot;R-12&quot;,&quot;name&quot;:&quot;デスペラード&quot;,&quot;kana&quot;:&quot;ですぺらーど&quot;,&quot;traitText&quot;:null,&quot;ruleText&quot;:&quot;自分の戦場のイジン1体と相手の戦場のガーディアン1体を指定して発動できる。そのイジンとガーディアンを破壊する。&quot;,&quot;legacyText&quot;:&quot;冥府発動&quot;,&quot;imageUrl&quot;:&quot;https://one-draw.jp/ijinden/cardlist/R01/card/R_012.png&quot;,&quot;expansion&quot;:10,&quot;rarity&quot;:1,&quot;type&quot;:3,&quot;level&quot;:3,&quot;color&quot;:1,&quot;term&quot;:0,&quot;trait&quot;:0,&quot;legacy&quot;:2,&quot;orderTable&quot;:12,&quot;orderDeck&quot;:305}," calcext:value-type="string">
            <text:p>{"id":"R-12","name":"デスペラード","kana":"ですぺらーど","traitText":null,"ruleText":"自分の戦場のイジン1体と相手の戦場のガーディアン1体を指定して発動できる。そのイジンとガーディアンを破壊する。","legacyText":"冥府発動","imageUrl":"https://one-draw.jp/ijinden/cardlist/R01/card/R_012.png","expansion":10,"rarity":1,"type":3,"level":3,"color":1,"term":0,"trait":0,"legacy":2,"orderTable":12,"orderDeck":305},</text:p>
          </table:table-cell>
          <table:table-cell table:number-columns-repeated="16347"/>
        </table:table-row>
        <table:table-row table:style-name="ro2">
          <table:table-cell office:value-type="float" office:value="13" calcext:value-type="float">
            <text:p>13</text:p>
          </table:table-cell>
          <table:table-cell office:value-type="float" office:value="343" calcext:value-type="float">
            <text:p>343</text:p>
          </table:table-cell>
          <table:table-cell office:value-type="string" calcext:value-type="string">
            <text:p>R-13</text:p>
          </table:table-cell>
          <table:table-cell office:value-type="float" office:value="13" calcext:value-type="float">
            <text:p>13</text:p>
          </table:table-cell>
          <table:table-cell office:value-type="string" calcext:value-type="string">
            <text:p>レッドストーン</text:p>
          </table:table-cell>
          <table:table-cell office:value-type="string" calcext:value-type="string">
            <text:p>れっどすとーん</text:p>
          </table:table-cell>
          <table:table-cell office:value-type="string" calcext:value-type="string">
            <text:p>伝説の武将デッキ</text:p>
          </table:table-cell>
          <table:table-cell table:formula="of:=VLOOKUP([.G14];[$収録番号.$A$1:$収録番号.$B$9];2;0)" office:value-type="float" office:value="10" calcext:value-type="float">
            <text:p>10</text:p>
          </table:table-cell>
          <table:table-cell office:value-type="string" calcext:value-type="string">
            <text:p>N</text:p>
          </table:table-cell>
          <table:table-cell table:formula="of:=VLOOKUP([.I14];[$レアリティ番号.$A$1:$レアリティ番号.$B$4];2;0)" office:value-type="float" office:value="1" calcext:value-type="float">
            <text:p>1</text:p>
          </table:table-cell>
          <table:table-cell office:value-type="string" calcext:value-type="string">
            <text:p>マリョク</text:p>
          </table:table-cell>
          <table:table-cell table:formula="of:=VLOOKUP([.K14];[$種類番号.$A$1:$種類番号.$B$4];2;0)" office:value-type="float" office:value="4" calcext:value-type="float">
            <text:p>4</text:p>
          </table:table-cell>
          <table:table-cell office:value-type="string" calcext:value-type="string">
            <text:p>赤</text:p>
          </table:table-cell>
          <table:table-cell table:formula="of:=VLOOKUP([.M14];[$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4];[$特性番号.$A$1:$特性番号.$B$8];2;0);0)" office:value-type="float" office:value="0" calcext:value-type="float">
            <text:p>0</text:p>
          </table:table-cell>
          <table:table-cell office:value-type="string" calcext:value-type="string">
            <text:p>※デッキに何枚でも入れてよい。</text:p>
          </table:table-cell>
          <table:table-cell table:style-name="ce8" office:value-type="string" calcext:value-type="string">
            <text:p>復元</text:p>
          </table:table-cell>
          <table:table-cell table:formula="of:=IFERROR(VLOOKUP([.$V14];[$遺業能力番号.$A$1:$遺業能力番号.$B$9];2;0);0)" office:value-type="float" office:value="3" calcext:value-type="float">
            <text:p>3</text:p>
          </table:table-cell>
          <table:table-cell office:value-type="string" calcext:value-type="string">
            <text:p>https://one-draw.jp/ijinden/cardlist/R01/card/R_013.png</text:p>
          </table:table-cell>
          <table:table-cell table:formula="of:=CONCATENATE([$JSON.$A$1];[.$C14];[$JSON.$B$1];[.$E14];[$JSON.$C$1];[.$F14];[$JSON.$D$1];IF(ISNA([.$S14]);&quot;null&quot;;&quot;&quot;&quot;&quot;&amp;[.$S14]&amp;&quot;&quot;&quot;&quot;);[$JSON.$E$1];[.$U14];[$JSON.$F$1];IF(ISNA([.$V14]);&quot;null&quot;;&quot;&quot;&quot;&quot;&amp;[.$V14]&amp;&quot;&quot;&quot;&quot;);[$JSON.$G$1];[.$X14];[$JSON.$H$1];[.$H14];[$JSON.$I$1];[.J14];[$JSON.$J$1];[.$L14];[$JSON.$K$1];[.$O14];[$JSON.$L$1];[.$N14];[$JSON.$M$1];[.$R14];[$JSON.$N$1];[.$T14];[$JSON.$O$1];[.$W14];[$JSON.$P$1];[.$A14];[$JSON.$Q$1];[.$B14];[$JSON.$R$1])" office:value-type="string" office:string-value="{&quot;id&quot;:&quot;R-13&quot;,&quot;name&quot;:&quot;レッドストーン&quot;,&quot;kana&quot;:&quot;れっどすとーん&quot;,&quot;traitText&quot;:null,&quot;ruleText&quot;:&quot;※デッキに何枚でも入れてよい。&quot;,&quot;legacyText&quot;:&quot;復元&quot;,&quot;imageUrl&quot;:&quot;https://one-draw.jp/ijinden/cardlist/R01/card/R_013.png&quot;,&quot;expansion&quot;:10,&quot;rarity&quot;:1,&quot;type&quot;:4,&quot;level&quot;:1,&quot;color&quot;:1,&quot;term&quot;:0,&quot;trait&quot;:0,&quot;legacy&quot;:3,&quot;orderTable&quot;:13,&quot;orderDeck&quot;:343}," calcext:value-type="string">
            <text:p>{"id":"R-13","name":"レッドストーン","kana":"れっどすとーん","traitText":null,"ruleText":"※デッキに何枚でも入れてよい。","legacyText":"復元","imageUrl":"https://one-draw.jp/ijinden/cardlist/R01/card/R_013.png","expansion":10,"rarity":1,"type":4,"level":1,"color":1,"term":0,"trait":0,"legacy":3,"orderTable":13,"orderDeck":343},</text:p>
          </table:table-cell>
          <table:table-cell table:number-columns-repeated="16347"/>
        </table:table-row>
        <table:table-row table:style-name="ro2">
          <table:table-cell office:value-type="float" office:value="14" calcext:value-type="float">
            <text:p>14</text:p>
          </table:table-cell>
          <table:table-cell office:value-type="float" office:value="186" calcext:value-type="float">
            <text:p>186</text:p>
          </table:table-cell>
          <table:table-cell office:value-type="string" calcext:value-type="string">
            <text:p>B-1</text:p>
          </table:table-cell>
          <table:table-cell office:value-type="float" office:value="1" calcext:value-type="float">
            <text:p>1</text:p>
          </table:table-cell>
          <table:table-cell office:value-type="string" calcext:value-type="string">
            <text:p>レオナルド・ダ・ヴィンチ</text:p>
          </table:table-cell>
          <table:table-cell office:value-type="string" calcext:value-type="string">
            <text:p>れおなるどだゔぃんち</text:p>
          </table:table-cell>
          <table:table-cell office:value-type="string" calcext:value-type="string">
            <text:p>知と美の革命デッキ</text:p>
          </table:table-cell>
          <table:table-cell table:formula="of:=VLOOKUP([.G15];[$収録番号.$A$1:$収録番号.$B$9];2;0)" office:value-type="float" office:value="11" calcext:value-type="float">
            <text:p>11</text:p>
          </table:table-cell>
          <table:table-cell office:value-type="string" calcext:value-type="string">
            <text:p>SR</text:p>
          </table:table-cell>
          <table:table-cell table:formula="of:=VLOOKUP([.I15];[$レアリティ番号.$A$1:$レアリティ番号.$B$4];2;0)" office:value-type="float" office:value="4" calcext:value-type="float">
            <text:p>4</text:p>
          </table:table-cell>
          <table:table-cell office:value-type="string" calcext:value-type="string">
            <text:p>イジン</text:p>
          </table:table-cell>
          <table:table-cell table:formula="of:=VLOOKUP([.K15];[$種類番号.$A$1:$種類番号.$B$4];2;0)" office:value-type="float" office:value="1" calcext:value-type="float">
            <text:p>1</text:p>
          </table:table-cell>
          <table:table-cell office:value-type="string" calcext:value-type="string">
            <text:p>青</text:p>
          </table:table-cell>
          <table:table-cell table:formula="of:=VLOOKUP([.M15];[$色番号.$A$1:$色番号.$B$10];2;0)" office:value-type="float" office:value="2" calcext:value-type="float">
            <text:p>2</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5];[$能力語番号.$A$1:$能力語番号.$B$10];2;0);0)" office:value-type="float" office:value="0" calcext:value-type="float">
            <text:p>0</text:p>
          </table:table-cell>
          <table:table-cell office:value-type="string" calcext:value-type="string">
            <text:p>美術</text:p>
          </table:table-cell>
          <table:table-cell table:formula="of:=IFERROR(VLOOKUP([.$S15];[$特性番号.$A$1:$特性番号.$B$8];2;0);0)" office:value-type="float" office:value="2" calcext:value-type="float">
            <text:p>2</text:p>
          </table:table-cell>
          <table:table-cell office:value-type="string" calcext:value-type="string">
            <text:p>戦場に置かれたとき、自分の墓地のレベル6以下のイジン1体か、自分の墓地のレベル5以下のハイケイ1つを指定して発動できる。そのイジンかハイケイを戦場に置く。</text:p>
          </table:table-cell>
          <table:table-cell table:style-name="ce8" table:formula="of:=NA()" office:value-type="string" office:string-value="" calcext:value-type="error">
            <text:p>#N/A</text:p>
          </table:table-cell>
          <table:table-cell table:formula="of:=IFERROR(VLOOKUP([.$V15];[$遺業能力番号.$A$1:$遺業能力番号.$B$9];2;0);0)" office:value-type="float" office:value="0" calcext:value-type="float">
            <text:p>0</text:p>
          </table:table-cell>
          <table:table-cell office:value-type="string" calcext:value-type="string">
            <text:p>https://one-draw.jp/ijinden/cardlist/B01/card/B_001.png</text:p>
          </table:table-cell>
          <table:table-cell table:formula="of:=CONCATENATE([$JSON.$A$1];[.$C15];[$JSON.$B$1];[.$E15];[$JSON.$C$1];[.$F15];[$JSON.$D$1];IF(ISNA([.$S15]);&quot;null&quot;;&quot;&quot;&quot;&quot;&amp;[.$S15]&amp;&quot;&quot;&quot;&quot;);[$JSON.$E$1];[.$U15];[$JSON.$F$1];IF(ISNA([.$V15]);&quot;null&quot;;&quot;&quot;&quot;&quot;&amp;[.$V15]&amp;&quot;&quot;&quot;&quot;);[$JSON.$G$1];[.$X15];[$JSON.$H$1];[.$H15];[$JSON.$I$1];[.J15];[$JSON.$J$1];[.$L15];[$JSON.$K$1];[.$O15];[$JSON.$L$1];[.$N15];[$JSON.$M$1];[.$R15];[$JSON.$N$1];[.$T15];[$JSON.$O$1];[.$W15];[$JSON.$P$1];[.$A15];[$JSON.$Q$1];[.$B15];[$JSON.$R$1])" office:value-type="string" office:string-value="{&quot;id&quot;:&quot;B-1&quot;,&quot;name&quot;:&quot;レオナルド・ダ・ヴィンチ&quot;,&quot;kana&quot;:&quot;れおなるどだゔぃんち&quot;,&quot;traitText&quot;:&quot;美術&quot;,&quot;ruleText&quot;:&quot;戦場に置かれたとき、自分の墓地のレベル6以下のイジン1体か、自分の墓地のレベル5以下のハイケイ1つを指定して発動できる。そのイジンかハイケイを戦場に置く。&quot;,&quot;legacyText&quot;:null,&quot;imageUrl&quot;:&quot;https://one-draw.jp/ijinden/cardlist/B01/card/B_001.png&quot;,&quot;expansion&quot;:11,&quot;rarity&quot;:4,&quot;type&quot;:1,&quot;level&quot;:6,&quot;color&quot;:2,&quot;term&quot;:0,&quot;trait&quot;:2,&quot;legacy&quot;:0,&quot;orderTable&quot;:14,&quot;orderDeck&quot;:186}," calcext:value-type="string">
            <text:p>{"id":"B-1","name":"レオナルド・ダ・ヴィンチ","kana":"れおなるどだゔぃんち","traitText":"美術","ruleText":"戦場に置かれたとき、自分の墓地のレベル6以下のイジン1体か、自分の墓地のレベル5以下のハイケイ1つを指定して発動できる。そのイジンかハイケイを戦場に置く。","legacyText":null,"imageUrl":"https://one-draw.jp/ijinden/cardlist/B01/card/B_001.png","expansion":11,"rarity":4,"type":1,"level":6,"color":2,"term":0,"trait":2,"legacy":0,"orderTable":14,"orderDeck":186},</text:p>
          </table:table-cell>
          <table:table-cell table:number-columns-repeated="16347"/>
        </table:table-row>
        <table:table-row table:style-name="ro2">
          <table:table-cell office:value-type="float" office:value="15" calcext:value-type="float">
            <text:p>15</text:p>
          </table:table-cell>
          <table:table-cell office:value-type="float" office:value="6" calcext:value-type="float">
            <text:p>6</text:p>
          </table:table-cell>
          <table:table-cell office:value-type="string" calcext:value-type="string">
            <text:p>B-2</text:p>
          </table:table-cell>
          <table:table-cell office:value-type="float" office:value="2" calcext:value-type="float">
            <text:p>2</text:p>
          </table:table-cell>
          <table:table-cell office:value-type="string" calcext:value-type="string">
            <text:p>ヴァスコ・ダ・ガマ</text:p>
          </table:table-cell>
          <table:table-cell office:value-type="string" calcext:value-type="string">
            <text:p>ゔぁすこだがま</text:p>
          </table:table-cell>
          <table:table-cell office:value-type="string" calcext:value-type="string">
            <text:p>知と美の革命デッキ</text:p>
          </table:table-cell>
          <table:table-cell table:formula="of:=VLOOKUP([.G16];[$収録番号.$A$1:$収録番号.$B$9];2;0)" office:value-type="float" office:value="11" calcext:value-type="float">
            <text:p>11</text:p>
          </table:table-cell>
          <table:table-cell office:value-type="string" calcext:value-type="string">
            <text:p>N</text:p>
          </table:table-cell>
          <table:table-cell table:formula="of:=VLOOKUP([.I16];[$レアリティ番号.$A$1:$レアリティ番号.$B$4];2;0)" office:value-type="float" office:value="1" calcext:value-type="float">
            <text:p>1</text:p>
          </table:table-cell>
          <table:table-cell office:value-type="string" calcext:value-type="string">
            <text:p>イジン</text:p>
          </table:table-cell>
          <table:table-cell table:formula="of:=VLOOKUP([.K16];[$種類番号.$A$1:$種類番号.$B$4];2;0)" office:value-type="float" office:value="1" calcext:value-type="float">
            <text:p>1</text:p>
          </table:table-cell>
          <table:table-cell office:value-type="string" calcext:value-type="string">
            <text:p>青</text:p>
          </table:table-cell>
          <table:table-cell table:formula="of:=VLOOKUP([.M16];[$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office:value-type="string" calcext:value-type="string">
            <text:p>航海</text:p>
          </table:table-cell>
          <table:table-cell table:formula="of:=IFERROR(VLOOKUP([.$Q16];[$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16];[$特性番号.$A$1:$特性番号.$B$8];2;0);0)" office:value-type="float" office:value="0" calcext:value-type="float">
            <text:p>0</text:p>
          </table:table-cell>
          <table:table-cell office:value-type="string" calcext:value-type="string">
            <text:p>航海 - アタッカーになったとき、1ドローして、自分の手札1枚を墓地に置く。</text:p>
          </table:table-cell>
          <table:table-cell table:style-name="ce8" office:value-type="string" calcext:value-type="string">
            <text:p>1ドローする</text:p>
          </table:table-cell>
          <table:table-cell table:formula="of:=IFERROR(VLOOKUP([.$V16];[$遺業能力番号.$A$1:$遺業能力番号.$B$9];2;0);0)" office:value-type="float" office:value="4" calcext:value-type="float">
            <text:p>4</text:p>
          </table:table-cell>
          <table:table-cell office:value-type="string" calcext:value-type="string">
            <text:p>https://one-draw.jp/ijinden/cardlist/B01/card/B_002.png</text:p>
          </table:table-cell>
          <table:table-cell table:formula="of:=CONCATENATE([$JSON.$A$1];[.$C16];[$JSON.$B$1];[.$E16];[$JSON.$C$1];[.$F16];[$JSON.$D$1];IF(ISNA([.$S16]);&quot;null&quot;;&quot;&quot;&quot;&quot;&amp;[.$S16]&amp;&quot;&quot;&quot;&quot;);[$JSON.$E$1];[.$U16];[$JSON.$F$1];IF(ISNA([.$V16]);&quot;null&quot;;&quot;&quot;&quot;&quot;&amp;[.$V16]&amp;&quot;&quot;&quot;&quot;);[$JSON.$G$1];[.$X16];[$JSON.$H$1];[.$H16];[$JSON.$I$1];[.J16];[$JSON.$J$1];[.$L16];[$JSON.$K$1];[.$O16];[$JSON.$L$1];[.$N16];[$JSON.$M$1];[.$R16];[$JSON.$N$1];[.$T16];[$JSON.$O$1];[.$W16];[$JSON.$P$1];[.$A16];[$JSON.$Q$1];[.$B16];[$JSON.$R$1])" office:value-type="string" office:string-value="{&quot;id&quot;:&quot;B-2&quot;,&quot;name&quot;:&quot;ヴァスコ・ダ・ガマ&quot;,&quot;kana&quot;:&quot;ゔぁすこだがま&quot;,&quot;traitText&quot;:null,&quot;ruleText&quot;:&quot;航海 - アタッカーになったとき、1ドローして、自分の手札1枚を墓地に置く。&quot;,&quot;legacyText&quot;:&quot;1ドローする&quot;,&quot;imageUrl&quot;:&quot;https://one-draw.jp/ijinden/cardlist/B01/card/B_002.png&quot;,&quot;expansion&quot;:11,&quot;rarity&quot;:1,&quot;type&quot;:1,&quot;level&quot;:1,&quot;color&quot;:2,&quot;term&quot;:1,&quot;trait&quot;:0,&quot;legacy&quot;:4,&quot;orderTable&quot;:15,&quot;orderDeck&quot;:6}," calcext:value-type="string">
            <text:p>{"id":"B-2","name":"ヴァスコ・ダ・ガマ","kana":"ゔぁすこだがま","traitText":null,"ruleText":"航海 - アタッカーになったとき、1ドローして、自分の手札1枚を墓地に置く。","legacyText":"1ドローする","imageUrl":"https://one-draw.jp/ijinden/cardlist/B01/card/B_002.png","expansion":11,"rarity":1,"type":1,"level":1,"color":2,"term":1,"trait":0,"legacy":4,"orderTable":15,"orderDeck":6},</text:p>
          </table:table-cell>
          <table:table-cell table:number-columns-repeated="16347"/>
        </table:table-row>
        <table:table-row table:style-name="ro2">
          <table:table-cell office:value-type="float" office:value="16" calcext:value-type="float">
            <text:p>16</text:p>
          </table:table-cell>
          <table:table-cell office:value-type="float" office:value="32" calcext:value-type="float">
            <text:p>32</text:p>
          </table:table-cell>
          <table:table-cell office:value-type="string" calcext:value-type="string">
            <text:p>B-3</text:p>
          </table:table-cell>
          <table:table-cell office:value-type="float" office:value="3" calcext:value-type="float">
            <text:p>3</text:p>
          </table:table-cell>
          <table:table-cell office:value-type="string" calcext:value-type="string">
            <text:p>好太王</text:p>
          </table:table-cell>
          <table:table-cell office:value-type="string" calcext:value-type="string">
            <text:p>こうたいおう</text:p>
          </table:table-cell>
          <table:table-cell office:value-type="string" calcext:value-type="string">
            <text:p>知と美の革命デッキ</text:p>
          </table:table-cell>
          <table:table-cell table:formula="of:=VLOOKUP([.G17];[$収録番号.$A$1:$収録番号.$B$9];2;0)" office:value-type="float" office:value="11" calcext:value-type="float">
            <text:p>11</text:p>
          </table:table-cell>
          <table:table-cell office:value-type="string" calcext:value-type="string">
            <text:p>N</text:p>
          </table:table-cell>
          <table:table-cell table:formula="of:=VLOOKUP([.I17];[$レアリティ番号.$A$1:$レアリティ番号.$B$4];2;0)" office:value-type="float" office:value="1" calcext:value-type="float">
            <text:p>1</text:p>
          </table:table-cell>
          <table:table-cell office:value-type="string" calcext:value-type="string">
            <text:p>イジン</text:p>
          </table:table-cell>
          <table:table-cell table:formula="of:=VLOOKUP([.K17];[$種類番号.$A$1:$種類番号.$B$4];2;0)" office:value-type="float" office:value="1" calcext:value-type="float">
            <text:p>1</text:p>
          </table:table-cell>
          <table:table-cell office:value-type="string" calcext:value-type="string">
            <text:p>青</text:p>
          </table:table-cell>
          <table:table-cell table:formula="of:=VLOOKUP([.M17];[$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7];[$特性番号.$A$1:$特性番号.$B$8];2;0);0)" office:value-type="float" office:value="0" calcext:value-type="float">
            <text:p>0</text:p>
          </table:table-cell>
          <table:table-cell office:value-type="string" calcext:value-type="string">
            <text:p>パワー1000以下のイジンにブロックされない。¶ブロッカーになれない。</text:p>
          </table:table-cell>
          <table:table-cell table:style-name="ce8" office:value-type="string" calcext:value-type="string">
            <text:p>1ドローする</text:p>
          </table:table-cell>
          <table:table-cell table:formula="of:=IFERROR(VLOOKUP([.$V17];[$遺業能力番号.$A$1:$遺業能力番号.$B$9];2;0);0)" office:value-type="float" office:value="4" calcext:value-type="float">
            <text:p>4</text:p>
          </table:table-cell>
          <table:table-cell office:value-type="string" calcext:value-type="string">
            <text:p>https://one-draw.jp/ijinden/cardlist/B01/card/B_003.png</text:p>
          </table:table-cell>
          <table:table-cell table:formula="of:=CONCATENATE([$JSON.$A$1];[.$C17];[$JSON.$B$1];[.$E17];[$JSON.$C$1];[.$F17];[$JSON.$D$1];IF(ISNA([.$S17]);&quot;null&quot;;&quot;&quot;&quot;&quot;&amp;[.$S17]&amp;&quot;&quot;&quot;&quot;);[$JSON.$E$1];[.$U17];[$JSON.$F$1];IF(ISNA([.$V17]);&quot;null&quot;;&quot;&quot;&quot;&quot;&amp;[.$V17]&amp;&quot;&quot;&quot;&quot;);[$JSON.$G$1];[.$X17];[$JSON.$H$1];[.$H17];[$JSON.$I$1];[.J17];[$JSON.$J$1];[.$L17];[$JSON.$K$1];[.$O17];[$JSON.$L$1];[.$N17];[$JSON.$M$1];[.$R17];[$JSON.$N$1];[.$T17];[$JSON.$O$1];[.$W17];[$JSON.$P$1];[.$A17];[$JSON.$Q$1];[.$B17];[$JSON.$R$1])" office:value-type="string" office:string-value="{&quot;id&quot;:&quot;B-3&quot;,&quot;name&quot;:&quot;好太王&quot;,&quot;kana&quot;:&quot;こうたいおう&quot;,&quot;traitText&quot;:null,&quot;ruleText&quot;:&quot;パワー1000以下のイジンにブロックされない。¶ブロッカーになれない。&quot;,&quot;legacyText&quot;:&quot;1ドローする&quot;,&quot;imageUrl&quot;:&quot;https://one-draw.jp/ijinden/cardlist/B01/card/B_003.png&quot;,&quot;expansion&quot;:11,&quot;rarity&quot;:1,&quot;type&quot;:1,&quot;level&quot;:2,&quot;color&quot;:2,&quot;term&quot;:0,&quot;trait&quot;:0,&quot;legacy&quot;:4,&quot;orderTable&quot;:16,&quot;orderDeck&quot;:32}," calcext:value-type="string">
            <text:p>{"id":"B-3","name":"好太王","kana":"こうたいおう","traitText":null,"ruleText":"パワー1000以下のイジンにブロックされない。¶ブロッカーになれない。","legacyText":"1ドローする","imageUrl":"https://one-draw.jp/ijinden/cardlist/B01/card/B_003.png","expansion":11,"rarity":1,"type":1,"level":2,"color":2,"term":0,"trait":0,"legacy":4,"orderTable":16,"orderDeck":32},</text:p>
          </table:table-cell>
          <table:table-cell table:number-columns-repeated="16347"/>
        </table:table-row>
        <table:table-row table:style-name="ro2">
          <table:table-cell office:value-type="float" office:value="17" calcext:value-type="float">
            <text:p>17</text:p>
          </table:table-cell>
          <table:table-cell office:value-type="float" office:value="74" calcext:value-type="float">
            <text:p>74</text:p>
          </table:table-cell>
          <table:table-cell office:value-type="string" calcext:value-type="string">
            <text:p>B-4</text:p>
          </table:table-cell>
          <table:table-cell office:value-type="float" office:value="4" calcext:value-type="float">
            <text:p>4</text:p>
          </table:table-cell>
          <table:table-cell office:value-type="string" calcext:value-type="string">
            <text:p>フェルディナンド・マゼラン</text:p>
          </table:table-cell>
          <table:table-cell office:value-type="string" calcext:value-type="string">
            <text:p>ふぇるでぃなんどまぜらん</text:p>
          </table:table-cell>
          <table:table-cell office:value-type="string" calcext:value-type="string">
            <text:p>知と美の革命デッキ</text:p>
          </table:table-cell>
          <table:table-cell table:formula="of:=VLOOKUP([.G18];[$収録番号.$A$1:$収録番号.$B$9];2;0)" office:value-type="float" office:value="11" calcext:value-type="float">
            <text:p>11</text:p>
          </table:table-cell>
          <table:table-cell office:value-type="string" calcext:value-type="string">
            <text:p>N</text:p>
          </table:table-cell>
          <table:table-cell table:formula="of:=VLOOKUP([.I18];[$レアリティ番号.$A$1:$レアリティ番号.$B$4];2;0)" office:value-type="float" office:value="1" calcext:value-type="float">
            <text:p>1</text:p>
          </table:table-cell>
          <table:table-cell office:value-type="string" calcext:value-type="string">
            <text:p>イジン</text:p>
          </table:table-cell>
          <table:table-cell table:formula="of:=VLOOKUP([.K18];[$種類番号.$A$1:$種類番号.$B$4];2;0)" office:value-type="float" office:value="1" calcext:value-type="float">
            <text:p>1</text:p>
          </table:table-cell>
          <table:table-cell office:value-type="string" calcext:value-type="string">
            <text:p>青</text:p>
          </table:table-cell>
          <table:table-cell table:formula="of:=VLOOKUP([.M18];[$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航海</text:p>
          </table:table-cell>
          <table:table-cell table:formula="of:=IFERROR(VLOOKUP([.$Q18];[$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18];[$特性番号.$A$1:$特性番号.$B$8];2;0);0)" office:value-type="float" office:value="0" calcext:value-type="float">
            <text:p>0</text:p>
          </table:table-cell>
          <table:table-cell office:value-type="string" calcext:value-type="string">
            <text:p>航海 - アタッカーになったとき、相手の手札のカード1つを墓地に置く。そのカードは相手が選ぶ。</text:p>
          </table:table-cell>
          <table:table-cell table:style-name="ce8" table:formula="of:=NA()" office:value-type="string" office:string-value="" calcext:value-type="error">
            <text:p>#N/A</text:p>
          </table:table-cell>
          <table:table-cell table:formula="of:=IFERROR(VLOOKUP([.$V18];[$遺業能力番号.$A$1:$遺業能力番号.$B$9];2;0);0)" office:value-type="float" office:value="0" calcext:value-type="float">
            <text:p>0</text:p>
          </table:table-cell>
          <table:table-cell office:value-type="string" calcext:value-type="string">
            <text:p>https://one-draw.jp/ijinden/cardlist/B01/card/B_004.png</text:p>
          </table:table-cell>
          <table:table-cell table:formula="of:=CONCATENATE([$JSON.$A$1];[.$C18];[$JSON.$B$1];[.$E18];[$JSON.$C$1];[.$F18];[$JSON.$D$1];IF(ISNA([.$S18]);&quot;null&quot;;&quot;&quot;&quot;&quot;&amp;[.$S18]&amp;&quot;&quot;&quot;&quot;);[$JSON.$E$1];[.$U18];[$JSON.$F$1];IF(ISNA([.$V18]);&quot;null&quot;;&quot;&quot;&quot;&quot;&amp;[.$V18]&amp;&quot;&quot;&quot;&quot;);[$JSON.$G$1];[.$X18];[$JSON.$H$1];[.$H18];[$JSON.$I$1];[.J18];[$JSON.$J$1];[.$L18];[$JSON.$K$1];[.$O18];[$JSON.$L$1];[.$N18];[$JSON.$M$1];[.$R18];[$JSON.$N$1];[.$T18];[$JSON.$O$1];[.$W18];[$JSON.$P$1];[.$A18];[$JSON.$Q$1];[.$B18];[$JSON.$R$1])" office:value-type="string" office:string-value="{&quot;id&quot;:&quot;B-4&quot;,&quot;name&quot;:&quot;フェルディナンド・マゼラン&quot;,&quot;kana&quot;:&quot;ふぇるでぃなんどまぜらん&quot;,&quot;traitText&quot;:null,&quot;ruleText&quot;:&quot;航海 - アタッカーになったとき、相手の手札のカード1つを墓地に置く。そのカードは相手が選ぶ。&quot;,&quot;legacyText&quot;:null,&quot;imageUrl&quot;:&quot;https://one-draw.jp/ijinden/cardlist/B01/card/B_004.png&quot;,&quot;expansion&quot;:11,&quot;rarity&quot;:1,&quot;type&quot;:1,&quot;level&quot;:3,&quot;color&quot;:2,&quot;term&quot;:1,&quot;trait&quot;:0,&quot;legacy&quot;:0,&quot;orderTable&quot;:17,&quot;orderDeck&quot;:74}," calcext:value-type="string">
            <text:p>{"id":"B-4","name":"フェルディナンド・マゼラン","kana":"ふぇるでぃなんどまぜらん","traitText":null,"ruleText":"航海 - アタッカーになったとき、相手の手札のカード1つを墓地に置く。そのカードは相手が選ぶ。","legacyText":null,"imageUrl":"https://one-draw.jp/ijinden/cardlist/B01/card/B_004.png","expansion":11,"rarity":1,"type":1,"level":3,"color":2,"term":1,"trait":0,"legacy":0,"orderTable":17,"orderDeck":74},</text:p>
          </table:table-cell>
          <table:table-cell table:number-columns-repeated="16347"/>
        </table:table-row>
        <table:table-row table:style-name="ro2">
          <table:table-cell office:value-type="float" office:value="18" calcext:value-type="float">
            <text:p>18</text:p>
          </table:table-cell>
          <table:table-cell office:value-type="float" office:value="75" calcext:value-type="float">
            <text:p>75</text:p>
          </table:table-cell>
          <table:table-cell office:value-type="string" calcext:value-type="string">
            <text:p>B-5</text:p>
          </table:table-cell>
          <table:table-cell office:value-type="float" office:value="5" calcext:value-type="float">
            <text:p>5</text:p>
          </table:table-cell>
          <table:table-cell office:value-type="string" calcext:value-type="string">
            <text:p>ラファエロ・サンティ</text:p>
          </table:table-cell>
          <table:table-cell office:value-type="string" calcext:value-type="string">
            <text:p>らふぁえろさんてぃ</text:p>
          </table:table-cell>
          <table:table-cell office:value-type="string" calcext:value-type="string">
            <text:p>知と美の革命デッキ</text:p>
          </table:table-cell>
          <table:table-cell table:formula="of:=VLOOKUP([.G19];[$収録番号.$A$1:$収録番号.$B$9];2;0)" office:value-type="float" office:value="11" calcext:value-type="float">
            <text:p>11</text:p>
          </table:table-cell>
          <table:table-cell office:value-type="string" calcext:value-type="string">
            <text:p>N</text:p>
          </table:table-cell>
          <table:table-cell table:formula="of:=VLOOKUP([.I19];[$レアリティ番号.$A$1:$レアリティ番号.$B$4];2;0)" office:value-type="float" office:value="1" calcext:value-type="float">
            <text:p>1</text:p>
          </table:table-cell>
          <table:table-cell office:value-type="string" calcext:value-type="string">
            <text:p>イジン</text:p>
          </table:table-cell>
          <table:table-cell table:formula="of:=VLOOKUP([.K19];[$種類番号.$A$1:$種類番号.$B$4];2;0)" office:value-type="float" office:value="1" calcext:value-type="float">
            <text:p>1</text:p>
          </table:table-cell>
          <table:table-cell office:value-type="string" calcext:value-type="string">
            <text:p>青</text:p>
          </table:table-cell>
          <table:table-cell table:formula="of:=VLOOKUP([.M19];[$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9];[$能力語番号.$A$1:$能力語番号.$B$10];2;0);0)" office:value-type="float" office:value="0" calcext:value-type="float">
            <text:p>0</text:p>
          </table:table-cell>
          <table:table-cell office:value-type="string" calcext:value-type="string">
            <text:p>美術</text:p>
          </table:table-cell>
          <table:table-cell table:formula="of:=IFERROR(VLOOKUP([.$S19];[$特性番号.$A$1:$特性番号.$B$8];2;0);0)" office:value-type="float" office:value="2" calcext:value-type="float">
            <text:p>2</text:p>
          </table:table-cell>
          <table:table-cell office:value-type="string" calcext:value-type="string">
            <text:p>戦場に置かれたとき、自分の墓地のイジン1体かハイケイ1つを手札に戻す。</text:p>
          </table:table-cell>
          <table:table-cell table:style-name="ce8" table:formula="of:=NA()" office:value-type="string" office:string-value="" calcext:value-type="error">
            <text:p>#N/A</text:p>
          </table:table-cell>
          <table:table-cell table:formula="of:=IFERROR(VLOOKUP([.$V19];[$遺業能力番号.$A$1:$遺業能力番号.$B$9];2;0);0)" office:value-type="float" office:value="0" calcext:value-type="float">
            <text:p>0</text:p>
          </table:table-cell>
          <table:table-cell office:value-type="string" calcext:value-type="string">
            <text:p>https://one-draw.jp/ijinden/cardlist/B01/card/B_005.png</text:p>
          </table:table-cell>
          <table:table-cell table:formula="of:=CONCATENATE([$JSON.$A$1];[.$C19];[$JSON.$B$1];[.$E19];[$JSON.$C$1];[.$F19];[$JSON.$D$1];IF(ISNA([.$S19]);&quot;null&quot;;&quot;&quot;&quot;&quot;&amp;[.$S19]&amp;&quot;&quot;&quot;&quot;);[$JSON.$E$1];[.$U19];[$JSON.$F$1];IF(ISNA([.$V19]);&quot;null&quot;;&quot;&quot;&quot;&quot;&amp;[.$V19]&amp;&quot;&quot;&quot;&quot;);[$JSON.$G$1];[.$X19];[$JSON.$H$1];[.$H19];[$JSON.$I$1];[.J19];[$JSON.$J$1];[.$L19];[$JSON.$K$1];[.$O19];[$JSON.$L$1];[.$N19];[$JSON.$M$1];[.$R19];[$JSON.$N$1];[.$T19];[$JSON.$O$1];[.$W19];[$JSON.$P$1];[.$A19];[$JSON.$Q$1];[.$B19];[$JSON.$R$1])" office:value-type="string" office:string-value="{&quot;id&quot;:&quot;B-5&quot;,&quot;name&quot;:&quot;ラファエロ・サンティ&quot;,&quot;kana&quot;:&quot;らふぁえろさんてぃ&quot;,&quot;traitText&quot;:&quot;美術&quot;,&quot;ruleText&quot;:&quot;戦場に置かれたとき、自分の墓地のイジン1体かハイケイ1つを手札に戻す。&quot;,&quot;legacyText&quot;:null,&quot;imageUrl&quot;:&quot;https://one-draw.jp/ijinden/cardlist/B01/card/B_005.png&quot;,&quot;expansion&quot;:11,&quot;rarity&quot;:1,&quot;type&quot;:1,&quot;level&quot;:3,&quot;color&quot;:2,&quot;term&quot;:0,&quot;trait&quot;:2,&quot;legacy&quot;:0,&quot;orderTable&quot;:18,&quot;orderDeck&quot;:75}," calcext:value-type="string">
            <text:p>{"id":"B-5","name":"ラファエロ・サンティ","kana":"らふぁえろさんてぃ","traitText":"美術","ruleText":"戦場に置かれたとき、自分の墓地のイジン1体かハイケイ1つを手札に戻す。","legacyText":null,"imageUrl":"https://one-draw.jp/ijinden/cardlist/B01/card/B_005.png","expansion":11,"rarity":1,"type":1,"level":3,"color":2,"term":0,"trait":2,"legacy":0,"orderTable":18,"orderDeck":75},</text:p>
          </table:table-cell>
          <table:table-cell table:number-columns-repeated="16347"/>
        </table:table-row>
        <table:table-row table:style-name="ro2">
          <table:table-cell office:value-type="float" office:value="19" calcext:value-type="float">
            <text:p>19</text:p>
          </table:table-cell>
          <table:table-cell office:value-type="float" office:value="33" calcext:value-type="float">
            <text:p>33</text:p>
          </table:table-cell>
          <table:table-cell office:value-type="string" calcext:value-type="string">
            <text:p>B-6</text:p>
          </table:table-cell>
          <table:table-cell office:value-type="float" office:value="6" calcext:value-type="float">
            <text:p>6</text:p>
          </table:table-cell>
          <table:table-cell office:value-type="string" calcext:value-type="string">
            <text:p>ジャン・カルヴァン</text:p>
          </table:table-cell>
          <table:table-cell office:value-type="string" calcext:value-type="string">
            <text:p>じゃんかるゔぁん</text:p>
          </table:table-cell>
          <table:table-cell office:value-type="string" calcext:value-type="string">
            <text:p>知と美の革命デッキ</text:p>
          </table:table-cell>
          <table:table-cell table:formula="of:=VLOOKUP([.G20];[$収録番号.$A$1:$収録番号.$B$9];2;0)" office:value-type="float" office:value="11" calcext:value-type="float">
            <text:p>11</text:p>
          </table:table-cell>
          <table:table-cell office:value-type="string" calcext:value-type="string">
            <text:p>N</text:p>
          </table:table-cell>
          <table:table-cell table:formula="of:=VLOOKUP([.I20];[$レアリティ番号.$A$1:$レアリティ番号.$B$4];2;0)" office:value-type="float" office:value="1" calcext:value-type="float">
            <text:p>1</text:p>
          </table:table-cell>
          <table:table-cell office:value-type="string" calcext:value-type="string">
            <text:p>イジン</text:p>
          </table:table-cell>
          <table:table-cell table:formula="of:=VLOOKUP([.K20];[$種類番号.$A$1:$種類番号.$B$4];2;0)" office:value-type="float" office:value="1" calcext:value-type="float">
            <text:p>1</text:p>
          </table:table-cell>
          <table:table-cell office:value-type="string" calcext:value-type="string">
            <text:p>青</text:p>
          </table:table-cell>
          <table:table-cell table:formula="of:=VLOOKUP([.M20];[$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0];[$特性番号.$A$1:$特性番号.$B$8];2;0);0)" office:value-type="float" office:value="0" calcext:value-type="float">
            <text:p>0</text:p>
          </table:table-cell>
          <table:table-cell office:value-type="string" calcext:value-type="string">
            <text:p>メインフェイズが開始したとき、自分の魔力ゾーンのマリョク1つを裏にして発動できる。このターンの間「執筆」は発動しない。¶相手のターンの間「パワー+2000」を得る。</text:p>
          </table:table-cell>
          <table:table-cell table:style-name="ce8" office:value-type="string" calcext:value-type="string">
            <text:p>1ドローする</text:p>
          </table:table-cell>
          <table:table-cell table:formula="of:=IFERROR(VLOOKUP([.$V20];[$遺業能力番号.$A$1:$遺業能力番号.$B$9];2;0);0)" office:value-type="float" office:value="4" calcext:value-type="float">
            <text:p>4</text:p>
          </table:table-cell>
          <table:table-cell office:value-type="string" calcext:value-type="string">
            <text:p>https://one-draw.jp/ijinden/cardlist/B01/card/B_006.png</text:p>
          </table:table-cell>
          <table:table-cell table:formula="of:=CONCATENATE([$JSON.$A$1];[.$C20];[$JSON.$B$1];[.$E20];[$JSON.$C$1];[.$F20];[$JSON.$D$1];IF(ISNA([.$S20]);&quot;null&quot;;&quot;&quot;&quot;&quot;&amp;[.$S20]&amp;&quot;&quot;&quot;&quot;);[$JSON.$E$1];[.$U20];[$JSON.$F$1];IF(ISNA([.$V20]);&quot;null&quot;;&quot;&quot;&quot;&quot;&amp;[.$V20]&amp;&quot;&quot;&quot;&quot;);[$JSON.$G$1];[.$X20];[$JSON.$H$1];[.$H20];[$JSON.$I$1];[.J20];[$JSON.$J$1];[.$L20];[$JSON.$K$1];[.$O20];[$JSON.$L$1];[.$N20];[$JSON.$M$1];[.$R20];[$JSON.$N$1];[.$T20];[$JSON.$O$1];[.$W20];[$JSON.$P$1];[.$A20];[$JSON.$Q$1];[.$B20];[$JSON.$R$1])" office:value-type="string" office:string-value="{&quot;id&quot;:&quot;B-6&quot;,&quot;name&quot;:&quot;ジャン・カルヴァン&quot;,&quot;kana&quot;:&quot;じゃんかるゔぁん&quot;,&quot;traitText&quot;:null,&quot;ruleText&quot;:&quot;メインフェイズが開始したとき、自分の魔力ゾーンのマリョク1つを裏にして発動できる。このターンの間「執筆」は発動しない。¶相手のターンの間「パワー+2000」を得る。&quot;,&quot;legacyText&quot;:&quot;1ドローする&quot;,&quot;imageUrl&quot;:&quot;https://one-draw.jp/ijinden/cardlist/B01/card/B_006.png&quot;,&quot;expansion&quot;:11,&quot;rarity&quot;:1,&quot;type&quot;:1,&quot;level&quot;:2,&quot;color&quot;:2,&quot;term&quot;:0,&quot;trait&quot;:0,&quot;legacy&quot;:4,&quot;orderTable&quot;:19,&quot;orderDeck&quot;:33}," calcext:value-type="string">
            <text:p>{"id":"B-6","name":"ジャン・カルヴァン","kana":"じゃんかるゔぁん","traitText":null,"ruleText":"メインフェイズが開始したとき、自分の魔力ゾーンのマリョク1つを裏にして発動できる。このターンの間「執筆」は発動しない。¶相手のターンの間「パワー+2000」を得る。","legacyText":"1ドローする","imageUrl":"https://one-draw.jp/ijinden/cardlist/B01/card/B_006.png","expansion":11,"rarity":1,"type":1,"level":2,"color":2,"term":0,"trait":0,"legacy":4,"orderTable":19,"orderDeck":33},</text:p>
          </table:table-cell>
          <table:table-cell table:number-columns-repeated="16347"/>
        </table:table-row>
        <table:table-row table:style-name="ro2">
          <table:table-cell office:value-type="float" office:value="20" calcext:value-type="float">
            <text:p>20</text:p>
          </table:table-cell>
          <table:table-cell office:value-type="float" office:value="76" calcext:value-type="float">
            <text:p>76</text:p>
          </table:table-cell>
          <table:table-cell office:value-type="string" calcext:value-type="string">
            <text:p>B-7</text:p>
          </table:table-cell>
          <table:table-cell office:value-type="float" office:value="7" calcext:value-type="float">
            <text:p>7</text:p>
          </table:table-cell>
          <table:table-cell office:value-type="string" calcext:value-type="string">
            <text:p>武帝</text:p>
          </table:table-cell>
          <table:table-cell office:value-type="string" calcext:value-type="string">
            <text:p>ぶてい</text:p>
          </table:table-cell>
          <table:table-cell office:value-type="string" calcext:value-type="string">
            <text:p>知と美の革命デッキ</text:p>
          </table:table-cell>
          <table:table-cell table:formula="of:=VLOOKUP([.G21];[$収録番号.$A$1:$収録番号.$B$9];2;0)" office:value-type="float" office:value="11" calcext:value-type="float">
            <text:p>11</text:p>
          </table:table-cell>
          <table:table-cell office:value-type="string" calcext:value-type="string">
            <text:p>N</text:p>
          </table:table-cell>
          <table:table-cell table:formula="of:=VLOOKUP([.I21];[$レアリティ番号.$A$1:$レアリティ番号.$B$4];2;0)" office:value-type="float" office:value="1" calcext:value-type="float">
            <text:p>1</text:p>
          </table:table-cell>
          <table:table-cell office:value-type="string" calcext:value-type="string">
            <text:p>イジン</text:p>
          </table:table-cell>
          <table:table-cell table:formula="of:=VLOOKUP([.K21];[$種類番号.$A$1:$種類番号.$B$4];2;0)" office:value-type="float" office:value="1" calcext:value-type="float">
            <text:p>1</text:p>
          </table:table-cell>
          <table:table-cell office:value-type="string" calcext:value-type="string">
            <text:p>青</text:p>
          </table:table-cell>
          <table:table-cell table:formula="of:=VLOOKUP([.M21];[$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1];[$特性番号.$A$1:$特性番号.$B$8];2;0);0)" office:value-type="float" office:value="0" calcext:value-type="float">
            <text:p>0</text:p>
          </table:table-cell>
          <table:table-cell office:value-type="string" calcext:value-type="string">
            <text:p>自分の戦場のイジン1体につき「パワー+1000」を得る。¶パワー5000以上の間「ダブルプレッシャー」を得る。</text:p>
          </table:table-cell>
          <table:table-cell table:style-name="ce8" table:formula="of:=NA()" office:value-type="string" office:string-value="" calcext:value-type="error">
            <text:p>#N/A</text:p>
          </table:table-cell>
          <table:table-cell table:formula="of:=IFERROR(VLOOKUP([.$V21];[$遺業能力番号.$A$1:$遺業能力番号.$B$9];2;0);0)" office:value-type="float" office:value="0" calcext:value-type="float">
            <text:p>0</text:p>
          </table:table-cell>
          <table:table-cell office:value-type="string" calcext:value-type="string">
            <text:p>https://one-draw.jp/ijinden/cardlist/B01/card/B_007.png</text:p>
          </table:table-cell>
          <table:table-cell table:formula="of:=CONCATENATE([$JSON.$A$1];[.$C21];[$JSON.$B$1];[.$E21];[$JSON.$C$1];[.$F21];[$JSON.$D$1];IF(ISNA([.$S21]);&quot;null&quot;;&quot;&quot;&quot;&quot;&amp;[.$S21]&amp;&quot;&quot;&quot;&quot;);[$JSON.$E$1];[.$U21];[$JSON.$F$1];IF(ISNA([.$V21]);&quot;null&quot;;&quot;&quot;&quot;&quot;&amp;[.$V21]&amp;&quot;&quot;&quot;&quot;);[$JSON.$G$1];[.$X21];[$JSON.$H$1];[.$H21];[$JSON.$I$1];[.J21];[$JSON.$J$1];[.$L21];[$JSON.$K$1];[.$O21];[$JSON.$L$1];[.$N21];[$JSON.$M$1];[.$R21];[$JSON.$N$1];[.$T21];[$JSON.$O$1];[.$W21];[$JSON.$P$1];[.$A21];[$JSON.$Q$1];[.$B21];[$JSON.$R$1])" office:value-type="string" office:string-value="{&quot;id&quot;:&quot;B-7&quot;,&quot;name&quot;:&quot;武帝&quot;,&quot;kana&quot;:&quot;ぶてい&quot;,&quot;traitText&quot;:null,&quot;ruleText&quot;:&quot;自分の戦場のイジン1体につき「パワー+1000」を得る。¶パワー5000以上の間「ダブルプレッシャー」を得る。&quot;,&quot;legacyText&quot;:null,&quot;imageUrl&quot;:&quot;https://one-draw.jp/ijinden/cardlist/B01/card/B_007.png&quot;,&quot;expansion&quot;:11,&quot;rarity&quot;:1,&quot;type&quot;:1,&quot;level&quot;:3,&quot;color&quot;:2,&quot;term&quot;:0,&quot;trait&quot;:0,&quot;legacy&quot;:0,&quot;orderTable&quot;:20,&quot;orderDeck&quot;:76}," calcext:value-type="string">
            <text:p>{"id":"B-7","name":"武帝","kana":"ぶてい","traitText":null,"ruleText":"自分の戦場のイジン1体につき「パワー+1000」を得る。¶パワー5000以上の間「ダブルプレッシャー」を得る。","legacyText":null,"imageUrl":"https://one-draw.jp/ijinden/cardlist/B01/card/B_007.png","expansion":11,"rarity":1,"type":1,"level":3,"color":2,"term":0,"trait":0,"legacy":0,"orderTable":20,"orderDeck":76},</text:p>
          </table:table-cell>
          <table:table-cell table:number-columns-repeated="16347"/>
        </table:table-row>
        <table:table-row table:style-name="ro2">
          <table:table-cell office:value-type="float" office:value="21" calcext:value-type="float">
            <text:p>21</text:p>
          </table:table-cell>
          <table:table-cell office:value-type="float" office:value="154" calcext:value-type="float">
            <text:p>154</text:p>
          </table:table-cell>
          <table:table-cell office:value-type="string" calcext:value-type="string">
            <text:p>B-8</text:p>
          </table:table-cell>
          <table:table-cell office:value-type="float" office:value="8" calcext:value-type="float">
            <text:p>8</text:p>
          </table:table-cell>
          <table:table-cell office:value-type="string" calcext:value-type="string">
            <text:p>楊貴妃</text:p>
          </table:table-cell>
          <table:table-cell office:value-type="string" calcext:value-type="string">
            <text:p>ようきひ</text:p>
          </table:table-cell>
          <table:table-cell office:value-type="string" calcext:value-type="string">
            <text:p>知と美の革命デッキ</text:p>
          </table:table-cell>
          <table:table-cell table:formula="of:=VLOOKUP([.G22];[$収録番号.$A$1:$収録番号.$B$9];2;0)" office:value-type="float" office:value="11" calcext:value-type="float">
            <text:p>11</text:p>
          </table:table-cell>
          <table:table-cell office:value-type="string" calcext:value-type="string">
            <text:p>N</text:p>
          </table:table-cell>
          <table:table-cell table:formula="of:=VLOOKUP([.I22];[$レアリティ番号.$A$1:$レアリティ番号.$B$4];2;0)" office:value-type="float" office:value="1" calcext:value-type="float">
            <text:p>1</text:p>
          </table:table-cell>
          <table:table-cell office:value-type="string" calcext:value-type="string">
            <text:p>イジン</text:p>
          </table:table-cell>
          <table:table-cell table:formula="of:=VLOOKUP([.K22];[$種類番号.$A$1:$種類番号.$B$4];2;0)" office:value-type="float" office:value="1" calcext:value-type="float">
            <text:p>1</text:p>
          </table:table-cell>
          <table:table-cell office:value-type="string" calcext:value-type="string">
            <text:p>青</text:p>
          </table:table-cell>
          <table:table-cell table:formula="of:=VLOOKUP([.M22];[$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2];[$特性番号.$A$1:$特性番号.$B$8];2;0);0)" office:value-type="float" office:value="0" calcext:value-type="float">
            <text:p>0</text:p>
          </table:table-cell>
          <table:table-cell office:value-type="string" calcext:value-type="string">
            <text:p>戦場に置かれたとき、自分の戦場のイジン1体を破壊して発動できる。3ドローする。¶自分の手札が5枚以上の間「イジンにブロックされない」を得る。</text:p>
          </table:table-cell>
          <table:table-cell table:style-name="ce8" table:formula="of:=NA()" office:value-type="string" office:string-value="" calcext:value-type="error">
            <text:p>#N/A</text:p>
          </table:table-cell>
          <table:table-cell table:formula="of:=IFERROR(VLOOKUP([.$V22];[$遺業能力番号.$A$1:$遺業能力番号.$B$9];2;0);0)" office:value-type="float" office:value="0" calcext:value-type="float">
            <text:p>0</text:p>
          </table:table-cell>
          <table:table-cell office:value-type="string" calcext:value-type="string">
            <text:p>https://one-draw.jp/ijinden/cardlist/B01/card/B_008.png</text:p>
          </table:table-cell>
          <table:table-cell table:formula="of:=CONCATENATE([$JSON.$A$1];[.$C22];[$JSON.$B$1];[.$E22];[$JSON.$C$1];[.$F22];[$JSON.$D$1];IF(ISNA([.$S22]);&quot;null&quot;;&quot;&quot;&quot;&quot;&amp;[.$S22]&amp;&quot;&quot;&quot;&quot;);[$JSON.$E$1];[.$U22];[$JSON.$F$1];IF(ISNA([.$V22]);&quot;null&quot;;&quot;&quot;&quot;&quot;&amp;[.$V22]&amp;&quot;&quot;&quot;&quot;);[$JSON.$G$1];[.$X22];[$JSON.$H$1];[.$H22];[$JSON.$I$1];[.J22];[$JSON.$J$1];[.$L22];[$JSON.$K$1];[.$O22];[$JSON.$L$1];[.$N22];[$JSON.$M$1];[.$R22];[$JSON.$N$1];[.$T22];[$JSON.$O$1];[.$W22];[$JSON.$P$1];[.$A22];[$JSON.$Q$1];[.$B22];[$JSON.$R$1])" office:value-type="string" office:string-value="{&quot;id&quot;:&quot;B-8&quot;,&quot;name&quot;:&quot;楊貴妃&quot;,&quot;kana&quot;:&quot;ようきひ&quot;,&quot;traitText&quot;:null,&quot;ruleText&quot;:&quot;戦場に置かれたとき、自分の戦場のイジン1体を破壊して発動できる。3ドローする。¶自分の手札が5枚以上の間「イジンにブロックされない」を得る。&quot;,&quot;legacyText&quot;:null,&quot;imageUrl&quot;:&quot;https://one-draw.jp/ijinden/cardlist/B01/card/B_008.png&quot;,&quot;expansion&quot;:11,&quot;rarity&quot;:1,&quot;type&quot;:1,&quot;level&quot;:5,&quot;color&quot;:2,&quot;term&quot;:0,&quot;trait&quot;:0,&quot;legacy&quot;:0,&quot;orderTable&quot;:21,&quot;orderDeck&quot;:154}," calcext:value-type="string">
            <text:p>{"id":"B-8","name":"楊貴妃","kana":"ようきひ","traitText":null,"ruleText":"戦場に置かれたとき、自分の戦場のイジン1体を破壊して発動できる。3ドローする。¶自分の手札が5枚以上の間「イジンにブロックされない」を得る。","legacyText":null,"imageUrl":"https://one-draw.jp/ijinden/cardlist/B01/card/B_008.png","expansion":11,"rarity":1,"type":1,"level":5,"color":2,"term":0,"trait":0,"legacy":0,"orderTable":21,"orderDeck":154},</text:p>
          </table:table-cell>
          <table:table-cell table:number-columns-repeated="16347"/>
        </table:table-row>
        <table:table-row table:style-name="ro2">
          <table:table-cell office:value-type="float" office:value="22" calcext:value-type="float">
            <text:p>22</text:p>
          </table:table-cell>
          <table:table-cell office:value-type="float" office:value="242" calcext:value-type="float">
            <text:p>242</text:p>
          </table:table-cell>
          <table:table-cell office:value-type="string" calcext:value-type="string">
            <text:p>B-9</text:p>
          </table:table-cell>
          <table:table-cell office:value-type="float" office:value="9" calcext:value-type="float">
            <text:p>9</text:p>
          </table:table-cell>
          <table:table-cell office:value-type="string" calcext:value-type="string">
            <text:p>モナ・リザ</text:p>
          </table:table-cell>
          <table:table-cell office:value-type="string" calcext:value-type="string">
            <text:p>もなりざ</text:p>
          </table:table-cell>
          <table:table-cell office:value-type="string" calcext:value-type="string">
            <text:p>知と美の革命デッキ</text:p>
          </table:table-cell>
          <table:table-cell table:formula="of:=VLOOKUP([.G23];[$収録番号.$A$1:$収録番号.$B$9];2;0)" office:value-type="float" office:value="11" calcext:value-type="float">
            <text:p>11</text:p>
          </table:table-cell>
          <table:table-cell office:value-type="string" calcext:value-type="string">
            <text:p>N</text:p>
          </table:table-cell>
          <table:table-cell table:formula="of:=VLOOKUP([.I23];[$レアリティ番号.$A$1:$レアリティ番号.$B$4];2;0)" office:value-type="float" office:value="1" calcext:value-type="float">
            <text:p>1</text:p>
          </table:table-cell>
          <table:table-cell office:value-type="string" calcext:value-type="string">
            <text:p>ハイケイ</text:p>
          </table:table-cell>
          <table:table-cell table:formula="of:=VLOOKUP([.K23];[$種類番号.$A$1:$種類番号.$B$4];2;0)" office:value-type="float" office:value="2" calcext:value-type="float">
            <text:p>2</text:p>
          </table:table-cell>
          <table:table-cell office:value-type="string" calcext:value-type="string">
            <text:p>青</text:p>
          </table:table-cell>
          <table:table-cell table:formula="of:=VLOOKUP([.M23];[$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3];[$能力語番号.$A$1:$能力語番号.$B$10];2;0);0)" office:value-type="float" office:value="0" calcext:value-type="float">
            <text:p>0</text:p>
          </table:table-cell>
          <table:table-cell office:value-type="string" calcext:value-type="string">
            <text:p>美術</text:p>
          </table:table-cell>
          <table:table-cell table:formula="of:=IFERROR(VLOOKUP([.$S23];[$特性番号.$A$1:$特性番号.$B$8];2;0);0)" office:value-type="float" office:value="2" calcext:value-type="float">
            <text:p>2</text:p>
          </table:table-cell>
          <table:table-cell office:value-type="string" calcext:value-type="string">
            <text:p>自分のメインフェイズが開始したとき、手札の「美術」カード1つを墓地に置いて発動できる。1ドローする。</text:p>
          </table:table-cell>
          <table:table-cell table:style-name="ce8" office:value-type="string" calcext:value-type="string">
            <text:p>手札に戻す</text:p>
          </table:table-cell>
          <table:table-cell table:formula="of:=IFERROR(VLOOKUP([.$V23];[$遺業能力番号.$A$1:$遺業能力番号.$B$9];2;0);0)" office:value-type="float" office:value="5" calcext:value-type="float">
            <text:p>5</text:p>
          </table:table-cell>
          <table:table-cell office:value-type="string" calcext:value-type="string">
            <text:p>https://one-draw.jp/ijinden/cardlist/B01/card/B_009.png</text:p>
          </table:table-cell>
          <table:table-cell table:formula="of:=CONCATENATE([$JSON.$A$1];[.$C23];[$JSON.$B$1];[.$E23];[$JSON.$C$1];[.$F23];[$JSON.$D$1];IF(ISNA([.$S23]);&quot;null&quot;;&quot;&quot;&quot;&quot;&amp;[.$S23]&amp;&quot;&quot;&quot;&quot;);[$JSON.$E$1];[.$U23];[$JSON.$F$1];IF(ISNA([.$V23]);&quot;null&quot;;&quot;&quot;&quot;&quot;&amp;[.$V23]&amp;&quot;&quot;&quot;&quot;);[$JSON.$G$1];[.$X23];[$JSON.$H$1];[.$H23];[$JSON.$I$1];[.J23];[$JSON.$J$1];[.$L23];[$JSON.$K$1];[.$O23];[$JSON.$L$1];[.$N23];[$JSON.$M$1];[.$R23];[$JSON.$N$1];[.$T23];[$JSON.$O$1];[.$W23];[$JSON.$P$1];[.$A23];[$JSON.$Q$1];[.$B23];[$JSON.$R$1])" office:value-type="string" office:string-value="{&quot;id&quot;:&quot;B-9&quot;,&quot;name&quot;:&quot;モナ・リザ&quot;,&quot;kana&quot;:&quot;もなりざ&quot;,&quot;traitText&quot;:&quot;美術&quot;,&quot;ruleText&quot;:&quot;自分のメインフェイズが開始したとき、手札の「美術」カード1つを墓地に置いて発動できる。1ドローする。&quot;,&quot;legacyText&quot;:&quot;手札に戻す&quot;,&quot;imageUrl&quot;:&quot;https://one-draw.jp/ijinden/cardlist/B01/card/B_009.png&quot;,&quot;expansion&quot;:11,&quot;rarity&quot;:1,&quot;type&quot;:2,&quot;level&quot;:2,&quot;color&quot;:2,&quot;term&quot;:0,&quot;trait&quot;:2,&quot;legacy&quot;:5,&quot;orderTable&quot;:22,&quot;orderDeck&quot;:242}," calcext:value-type="string">
            <text:p>{"id":"B-9","name":"モナ・リザ","kana":"もなりざ","traitText":"美術","ruleText":"自分のメインフェイズが開始したとき、手札の「美術」カード1つを墓地に置いて発動できる。1ドローする。","legacyText":"手札に戻す","imageUrl":"https://one-draw.jp/ijinden/cardlist/B01/card/B_009.png","expansion":11,"rarity":1,"type":2,"level":2,"color":2,"term":0,"trait":2,"legacy":5,"orderTable":22,"orderDeck":242},</text:p>
          </table:table-cell>
          <table:table-cell table:number-columns-repeated="16347"/>
        </table:table-row>
        <table:table-row table:style-name="ro2">
          <table:table-cell office:value-type="float" office:value="23" calcext:value-type="float">
            <text:p>23</text:p>
          </table:table-cell>
          <table:table-cell office:value-type="float" office:value="251" calcext:value-type="float">
            <text:p>251</text:p>
          </table:table-cell>
          <table:table-cell office:value-type="string" calcext:value-type="string">
            <text:p>B-10</text:p>
          </table:table-cell>
          <table:table-cell office:value-type="float" office:value="10" calcext:value-type="float">
            <text:p>10</text:p>
          </table:table-cell>
          <table:table-cell office:value-type="string" calcext:value-type="string">
            <text:p>革命の広場</text:p>
          </table:table-cell>
          <table:table-cell office:value-type="string" calcext:value-type="string">
            <text:p>かくめいのひろば</text:p>
          </table:table-cell>
          <table:table-cell office:value-type="string" calcext:value-type="string">
            <text:p>知と美の革命デッキ</text:p>
          </table:table-cell>
          <table:table-cell table:formula="of:=VLOOKUP([.G24];[$収録番号.$A$1:$収録番号.$B$9];2;0)" office:value-type="float" office:value="11" calcext:value-type="float">
            <text:p>11</text:p>
          </table:table-cell>
          <table:table-cell office:value-type="string" calcext:value-type="string">
            <text:p>N</text:p>
          </table:table-cell>
          <table:table-cell table:formula="of:=VLOOKUP([.I24];[$レアリティ番号.$A$1:$レアリティ番号.$B$4];2;0)" office:value-type="float" office:value="1" calcext:value-type="float">
            <text:p>1</text:p>
          </table:table-cell>
          <table:table-cell office:value-type="string" calcext:value-type="string">
            <text:p>ハイケイ</text:p>
          </table:table-cell>
          <table:table-cell table:formula="of:=VLOOKUP([.K24];[$種類番号.$A$1:$種類番号.$B$4];2;0)" office:value-type="float" office:value="2" calcext:value-type="float">
            <text:p>2</text:p>
          </table:table-cell>
          <table:table-cell office:value-type="string" calcext:value-type="string">
            <text:p>青</text:p>
          </table:table-cell>
          <table:table-cell table:formula="of:=VLOOKUP([.M24];[$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4];[$特性番号.$A$1:$特性番号.$B$8];2;0);0)" office:value-type="float" office:value="0" calcext:value-type="float">
            <text:p>0</text:p>
          </table:table-cell>
          <table:table-cell office:value-type="string" calcext:value-type="string">
            <text:p>イジンが破壊されるたび、1ドローする。¶自分のメインフェイズが開始したとき、自分の戦場のイジン1体を指定して発動できる。そのイジンを破壊する。</text:p>
          </table:table-cell>
          <table:table-cell table:style-name="ce8" office:value-type="string" calcext:value-type="string">
            <text:p>手札に戻す</text:p>
          </table:table-cell>
          <table:table-cell table:formula="of:=IFERROR(VLOOKUP([.$V24];[$遺業能力番号.$A$1:$遺業能力番号.$B$9];2;0);0)" office:value-type="float" office:value="5" calcext:value-type="float">
            <text:p>5</text:p>
          </table:table-cell>
          <table:table-cell office:value-type="string" calcext:value-type="string">
            <text:p>https://one-draw.jp/ijinden/cardlist/B01/card/B_010.png</text:p>
          </table:table-cell>
          <table:table-cell table:formula="of:=CONCATENATE([$JSON.$A$1];[.$C24];[$JSON.$B$1];[.$E24];[$JSON.$C$1];[.$F24];[$JSON.$D$1];IF(ISNA([.$S24]);&quot;null&quot;;&quot;&quot;&quot;&quot;&amp;[.$S24]&amp;&quot;&quot;&quot;&quot;);[$JSON.$E$1];[.$U24];[$JSON.$F$1];IF(ISNA([.$V24]);&quot;null&quot;;&quot;&quot;&quot;&quot;&amp;[.$V24]&amp;&quot;&quot;&quot;&quot;);[$JSON.$G$1];[.$X24];[$JSON.$H$1];[.$H24];[$JSON.$I$1];[.J24];[$JSON.$J$1];[.$L24];[$JSON.$K$1];[.$O24];[$JSON.$L$1];[.$N24];[$JSON.$M$1];[.$R24];[$JSON.$N$1];[.$T24];[$JSON.$O$1];[.$W24];[$JSON.$P$1];[.$A24];[$JSON.$Q$1];[.$B24];[$JSON.$R$1])" office:value-type="string" office:string-value="{&quot;id&quot;:&quot;B-10&quot;,&quot;name&quot;:&quot;革命の広場&quot;,&quot;kana&quot;:&quot;かくめいのひろば&quot;,&quot;traitText&quot;:null,&quot;ruleText&quot;:&quot;イジンが破壊されるたび、1ドローする。¶自分のメインフェイズが開始したとき、自分の戦場のイジン1体を指定して発動できる。そのイジンを破壊する。&quot;,&quot;legacyText&quot;:&quot;手札に戻す&quot;,&quot;imageUrl&quot;:&quot;https://one-draw.jp/ijinden/cardlist/B01/card/B_010.png&quot;,&quot;expansion&quot;:11,&quot;rarity&quot;:1,&quot;type&quot;:2,&quot;level&quot;:3,&quot;color&quot;:2,&quot;term&quot;:0,&quot;trait&quot;:0,&quot;legacy&quot;:5,&quot;orderTable&quot;:23,&quot;orderDeck&quot;:251}," calcext:value-type="string">
            <text:p>{"id":"B-10","name":"革命の広場","kana":"かくめいのひろば","traitText":null,"ruleText":"イジンが破壊されるたび、1ドローする。¶自分のメインフェイズが開始したとき、自分の戦場のイジン1体を指定して発動できる。そのイジンを破壊する。","legacyText":"手札に戻す","imageUrl":"https://one-draw.jp/ijinden/cardlist/B01/card/B_010.png","expansion":11,"rarity":1,"type":2,"level":3,"color":2,"term":0,"trait":0,"legacy":5,"orderTable":23,"orderDeck":251},</text:p>
          </table:table-cell>
          <table:table-cell table:number-columns-repeated="16347"/>
        </table:table-row>
        <table:table-row table:style-name="ro2">
          <table:table-cell office:value-type="float" office:value="24" calcext:value-type="float">
            <text:p>24</text:p>
          </table:table-cell>
          <table:table-cell office:value-type="float" office:value="307" calcext:value-type="float">
            <text:p>307</text:p>
          </table:table-cell>
          <table:table-cell office:value-type="string" calcext:value-type="string">
            <text:p>B-11</text:p>
          </table:table-cell>
          <table:table-cell office:value-type="float" office:value="11" calcext:value-type="float">
            <text:p>11</text:p>
          </table:table-cell>
          <table:table-cell office:value-type="string" calcext:value-type="string">
            <text:p>フリート</text:p>
          </table:table-cell>
          <table:table-cell office:value-type="string" calcext:value-type="string">
            <text:p>ふりーと</text:p>
          </table:table-cell>
          <table:table-cell office:value-type="string" calcext:value-type="string">
            <text:p>知と美の革命デッキ</text:p>
          </table:table-cell>
          <table:table-cell table:formula="of:=VLOOKUP([.G25];[$収録番号.$A$1:$収録番号.$B$9];2;0)" office:value-type="float" office:value="11" calcext:value-type="float">
            <text:p>11</text:p>
          </table:table-cell>
          <table:table-cell office:value-type="string" calcext:value-type="string">
            <text:p>N</text:p>
          </table:table-cell>
          <table:table-cell table:formula="of:=VLOOKUP([.I25];[$レアリティ番号.$A$1:$レアリティ番号.$B$4];2;0)" office:value-type="float" office:value="1" calcext:value-type="float">
            <text:p>1</text:p>
          </table:table-cell>
          <table:table-cell office:value-type="string" calcext:value-type="string">
            <text:p>マホウ</text:p>
          </table:table-cell>
          <table:table-cell table:formula="of:=VLOOKUP([.K25];[$種類番号.$A$1:$種類番号.$B$4];2;0)" office:value-type="float" office:value="3" calcext:value-type="float">
            <text:p>3</text:p>
          </table:table-cell>
          <table:table-cell office:value-type="string" calcext:value-type="string">
            <text:p>青</text:p>
          </table:table-cell>
          <table:table-cell table:formula="of:=VLOOKUP([.M25];[$色番号.$A$1:$色番号.$B$10];2;0)"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Q2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5];[$特性番号.$A$1:$特性番号.$B$8];2;0);0)" office:value-type="float" office:value="0" calcext:value-type="float">
            <text:p>0</text:p>
          </table:table-cell>
          <table:table-cell office:value-type="string" calcext:value-type="string">
            <text:p>このターンのバトル解決に際し、アタッカーは破壊されない。¶このターンの間「航海」を持つ戦場のイジンは「アタック+2000」を得る。</text:p>
          </table:table-cell>
          <table:table-cell table:style-name="ce8" table:formula="of:=NA()" office:value-type="string" office:string-value="" calcext:value-type="error">
            <text:p>#N/A</text:p>
          </table:table-cell>
          <table:table-cell table:formula="of:=IFERROR(VLOOKUP([.$V25];[$遺業能力番号.$A$1:$遺業能力番号.$B$9];2;0);0)" office:value-type="float" office:value="0" calcext:value-type="float">
            <text:p>0</text:p>
          </table:table-cell>
          <table:table-cell office:value-type="string" calcext:value-type="string">
            <text:p>https://one-draw.jp/ijinden/cardlist/B01/card/B_011.png</text:p>
          </table:table-cell>
          <table:table-cell table:formula="of:=CONCATENATE([$JSON.$A$1];[.$C25];[$JSON.$B$1];[.$E25];[$JSON.$C$1];[.$F25];[$JSON.$D$1];IF(ISNA([.$S25]);&quot;null&quot;;&quot;&quot;&quot;&quot;&amp;[.$S25]&amp;&quot;&quot;&quot;&quot;);[$JSON.$E$1];[.$U25];[$JSON.$F$1];IF(ISNA([.$V25]);&quot;null&quot;;&quot;&quot;&quot;&quot;&amp;[.$V25]&amp;&quot;&quot;&quot;&quot;);[$JSON.$G$1];[.$X25];[$JSON.$H$1];[.$H25];[$JSON.$I$1];[.J25];[$JSON.$J$1];[.$L25];[$JSON.$K$1];[.$O25];[$JSON.$L$1];[.$N25];[$JSON.$M$1];[.$R25];[$JSON.$N$1];[.$T25];[$JSON.$O$1];[.$W25];[$JSON.$P$1];[.$A25];[$JSON.$Q$1];[.$B25];[$JSON.$R$1])" office:value-type="string" office:string-value="{&quot;id&quot;:&quot;B-11&quot;,&quot;name&quot;:&quot;フリート&quot;,&quot;kana&quot;:&quot;ふりーと&quot;,&quot;traitText&quot;:null,&quot;ruleText&quot;:&quot;このターンのバトル解決に際し、アタッカーは破壊されない。¶このターンの間「航海」を持つ戦場のイジンは「アタック+2000」を得る。&quot;,&quot;legacyText&quot;:null,&quot;imageUrl&quot;:&quot;https://one-draw.jp/ijinden/cardlist/B01/card/B_011.png&quot;,&quot;expansion&quot;:11,&quot;rarity&quot;:1,&quot;type&quot;:3,&quot;level&quot;:3,&quot;color&quot;:2,&quot;term&quot;:0,&quot;trait&quot;:0,&quot;legacy&quot;:0,&quot;orderTable&quot;:24,&quot;orderDeck&quot;:307}," calcext:value-type="string">
            <text:p>{"id":"B-11","name":"フリート","kana":"ふりーと","traitText":null,"ruleText":"このターンのバトル解決に際し、アタッカーは破壊されない。¶このターンの間「航海」を持つ戦場のイジンは「アタック+2000」を得る。","legacyText":null,"imageUrl":"https://one-draw.jp/ijinden/cardlist/B01/card/B_011.png","expansion":11,"rarity":1,"type":3,"level":3,"color":2,"term":0,"trait":0,"legacy":0,"orderTable":24,"orderDeck":307},</text:p>
          </table:table-cell>
          <table:table-cell table:number-columns-repeated="16347"/>
        </table:table-row>
        <table:table-row table:style-name="ro2">
          <table:table-cell office:value-type="float" office:value="25" calcext:value-type="float">
            <text:p>25</text:p>
          </table:table-cell>
          <table:table-cell office:value-type="float" office:value="308" calcext:value-type="float">
            <text:p>308</text:p>
          </table:table-cell>
          <table:table-cell office:value-type="string" calcext:value-type="string">
            <text:p>B-12</text:p>
          </table:table-cell>
          <table:table-cell office:value-type="float" office:value="12" calcext:value-type="float">
            <text:p>12</text:p>
          </table:table-cell>
          <table:table-cell office:value-type="string" calcext:value-type="string">
            <text:p>ドローイング</text:p>
          </table:table-cell>
          <table:table-cell office:value-type="string" calcext:value-type="string">
            <text:p>どろーいんぐ</text:p>
          </table:table-cell>
          <table:table-cell office:value-type="string" calcext:value-type="string">
            <text:p>知と美の革命デッキ</text:p>
          </table:table-cell>
          <table:table-cell table:formula="of:=VLOOKUP([.G26];[$収録番号.$A$1:$収録番号.$B$9];2;0)" office:value-type="float" office:value="11" calcext:value-type="float">
            <text:p>11</text:p>
          </table:table-cell>
          <table:table-cell office:value-type="string" calcext:value-type="string">
            <text:p>N</text:p>
          </table:table-cell>
          <table:table-cell table:formula="of:=VLOOKUP([.I26];[$レアリティ番号.$A$1:$レアリティ番号.$B$4];2;0)" office:value-type="float" office:value="1" calcext:value-type="float">
            <text:p>1</text:p>
          </table:table-cell>
          <table:table-cell office:value-type="string" calcext:value-type="string">
            <text:p>マホウ</text:p>
          </table:table-cell>
          <table:table-cell table:formula="of:=VLOOKUP([.K26];[$種類番号.$A$1:$種類番号.$B$4];2;0)" office:value-type="float" office:value="3" calcext:value-type="float">
            <text:p>3</text:p>
          </table:table-cell>
          <table:table-cell office:value-type="string" calcext:value-type="string">
            <text:p>青</text:p>
          </table:table-cell>
          <table:table-cell table:formula="of:=VLOOKUP([.M26];[$色番号.$A$1:$色番号.$B$10];2;0)"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2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6];[$特性番号.$A$1:$特性番号.$B$8];2;0);0)" office:value-type="float" office:value="0" calcext:value-type="float">
            <text:p>0</text:p>
          </table:table-cell>
          <table:table-cell office:value-type="string" calcext:value-type="string">
            <text:p>2ドローする。</text:p>
          </table:table-cell>
          <table:table-cell table:style-name="ce8" office:value-type="string" calcext:value-type="string">
            <text:p>冥府発動</text:p>
          </table:table-cell>
          <table:table-cell table:formula="of:=IFERROR(VLOOKUP([.$V26];[$遺業能力番号.$A$1:$遺業能力番号.$B$9];2;0);0)" office:value-type="float" office:value="2" calcext:value-type="float">
            <text:p>2</text:p>
          </table:table-cell>
          <table:table-cell office:value-type="string" calcext:value-type="string">
            <text:p>https://one-draw.jp/ijinden/cardlist/B01/card/B_012.png</text:p>
          </table:table-cell>
          <table:table-cell table:formula="of:=CONCATENATE([$JSON.$A$1];[.$C26];[$JSON.$B$1];[.$E26];[$JSON.$C$1];[.$F26];[$JSON.$D$1];IF(ISNA([.$S26]);&quot;null&quot;;&quot;&quot;&quot;&quot;&amp;[.$S26]&amp;&quot;&quot;&quot;&quot;);[$JSON.$E$1];[.$U26];[$JSON.$F$1];IF(ISNA([.$V26]);&quot;null&quot;;&quot;&quot;&quot;&quot;&amp;[.$V26]&amp;&quot;&quot;&quot;&quot;);[$JSON.$G$1];[.$X26];[$JSON.$H$1];[.$H26];[$JSON.$I$1];[.J26];[$JSON.$J$1];[.$L26];[$JSON.$K$1];[.$O26];[$JSON.$L$1];[.$N26];[$JSON.$M$1];[.$R26];[$JSON.$N$1];[.$T26];[$JSON.$O$1];[.$W26];[$JSON.$P$1];[.$A26];[$JSON.$Q$1];[.$B26];[$JSON.$R$1])" office:value-type="string" office:string-value="{&quot;id&quot;:&quot;B-12&quot;,&quot;name&quot;:&quot;ドローイング&quot;,&quot;kana&quot;:&quot;どろーいんぐ&quot;,&quot;traitText&quot;:null,&quot;ruleText&quot;:&quot;2ドローする。&quot;,&quot;legacyText&quot;:&quot;冥府発動&quot;,&quot;imageUrl&quot;:&quot;https://one-draw.jp/ijinden/cardlist/B01/card/B_012.png&quot;,&quot;expansion&quot;:11,&quot;rarity&quot;:1,&quot;type&quot;:3,&quot;level&quot;:3,&quot;color&quot;:2,&quot;term&quot;:0,&quot;trait&quot;:0,&quot;legacy&quot;:2,&quot;orderTable&quot;:25,&quot;orderDeck&quot;:308}," calcext:value-type="string">
            <text:p>{"id":"B-12","name":"ドローイング","kana":"どろーいんぐ","traitText":null,"ruleText":"2ドローする。","legacyText":"冥府発動","imageUrl":"https://one-draw.jp/ijinden/cardlist/B01/card/B_012.png","expansion":11,"rarity":1,"type":3,"level":3,"color":2,"term":0,"trait":0,"legacy":2,"orderTable":25,"orderDeck":308},</text:p>
          </table:table-cell>
          <table:table-cell table:number-columns-repeated="16347"/>
        </table:table-row>
        <table:table-row table:style-name="ro2">
          <table:table-cell office:value-type="float" office:value="26" calcext:value-type="float">
            <text:p>26</text:p>
          </table:table-cell>
          <table:table-cell office:value-type="float" office:value="349" calcext:value-type="float">
            <text:p>349</text:p>
          </table:table-cell>
          <table:table-cell office:value-type="string" calcext:value-type="string">
            <text:p>B-13</text:p>
          </table:table-cell>
          <table:table-cell office:value-type="float" office:value="13" calcext:value-type="float">
            <text:p>13</text:p>
          </table:table-cell>
          <table:table-cell office:value-type="string" calcext:value-type="string">
            <text:p>ブルーストーン</text:p>
          </table:table-cell>
          <table:table-cell office:value-type="string" calcext:value-type="string">
            <text:p>ぶるーすとーん</text:p>
          </table:table-cell>
          <table:table-cell office:value-type="string" calcext:value-type="string">
            <text:p>知と美の革命デッキ</text:p>
          </table:table-cell>
          <table:table-cell table:formula="of:=VLOOKUP([.G27];[$収録番号.$A$1:$収録番号.$B$9];2;0)" office:value-type="float" office:value="11" calcext:value-type="float">
            <text:p>11</text:p>
          </table:table-cell>
          <table:table-cell office:value-type="string" calcext:value-type="string">
            <text:p>N</text:p>
          </table:table-cell>
          <table:table-cell table:formula="of:=VLOOKUP([.I27];[$レアリティ番号.$A$1:$レアリティ番号.$B$4];2;0)" office:value-type="float" office:value="1" calcext:value-type="float">
            <text:p>1</text:p>
          </table:table-cell>
          <table:table-cell office:value-type="string" calcext:value-type="string">
            <text:p>マリョク</text:p>
          </table:table-cell>
          <table:table-cell table:formula="of:=VLOOKUP([.K27];[$種類番号.$A$1:$種類番号.$B$4];2;0)" office:value-type="float" office:value="4" calcext:value-type="float">
            <text:p>4</text:p>
          </table:table-cell>
          <table:table-cell office:value-type="string" calcext:value-type="string">
            <text:p>青</text:p>
          </table:table-cell>
          <table:table-cell table:formula="of:=VLOOKUP([.M27];[$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7];[$特性番号.$A$1:$特性番号.$B$8];2;0);0)" office:value-type="float" office:value="0" calcext:value-type="float">
            <text:p>0</text:p>
          </table:table-cell>
          <table:table-cell office:value-type="string" calcext:value-type="string">
            <text:p>※デッキに何枚でも入れてよい。</text:p>
          </table:table-cell>
          <table:table-cell table:style-name="ce8" office:value-type="string" calcext:value-type="string">
            <text:p>復元</text:p>
          </table:table-cell>
          <table:table-cell table:formula="of:=IFERROR(VLOOKUP([.$V27];[$遺業能力番号.$A$1:$遺業能力番号.$B$9];2;0);0)" office:value-type="float" office:value="3" calcext:value-type="float">
            <text:p>3</text:p>
          </table:table-cell>
          <table:table-cell office:value-type="string" calcext:value-type="string">
            <text:p>https://one-draw.jp/ijinden/cardlist/B01/card/B_013.png</text:p>
          </table:table-cell>
          <table:table-cell table:formula="of:=CONCATENATE([$JSON.$A$1];[.$C27];[$JSON.$B$1];[.$E27];[$JSON.$C$1];[.$F27];[$JSON.$D$1];IF(ISNA([.$S27]);&quot;null&quot;;&quot;&quot;&quot;&quot;&amp;[.$S27]&amp;&quot;&quot;&quot;&quot;);[$JSON.$E$1];[.$U27];[$JSON.$F$1];IF(ISNA([.$V27]);&quot;null&quot;;&quot;&quot;&quot;&quot;&amp;[.$V27]&amp;&quot;&quot;&quot;&quot;);[$JSON.$G$1];[.$X27];[$JSON.$H$1];[.$H27];[$JSON.$I$1];[.J27];[$JSON.$J$1];[.$L27];[$JSON.$K$1];[.$O27];[$JSON.$L$1];[.$N27];[$JSON.$M$1];[.$R27];[$JSON.$N$1];[.$T27];[$JSON.$O$1];[.$W27];[$JSON.$P$1];[.$A27];[$JSON.$Q$1];[.$B27];[$JSON.$R$1])" office:value-type="string" office:string-value="{&quot;id&quot;:&quot;B-13&quot;,&quot;name&quot;:&quot;ブルーストーン&quot;,&quot;kana&quot;:&quot;ぶるーすとーん&quot;,&quot;traitText&quot;:null,&quot;ruleText&quot;:&quot;※デッキに何枚でも入れてよい。&quot;,&quot;legacyText&quot;:&quot;復元&quot;,&quot;imageUrl&quot;:&quot;https://one-draw.jp/ijinden/cardlist/B01/card/B_013.png&quot;,&quot;expansion&quot;:11,&quot;rarity&quot;:1,&quot;type&quot;:4,&quot;level&quot;:1,&quot;color&quot;:2,&quot;term&quot;:0,&quot;trait&quot;:0,&quot;legacy&quot;:3,&quot;orderTable&quot;:26,&quot;orderDeck&quot;:349}," calcext:value-type="string">
            <text:p>{"id":"B-13","name":"ブルーストーン","kana":"ぶるーすとーん","traitText":null,"ruleText":"※デッキに何枚でも入れてよい。","legacyText":"復元","imageUrl":"https://one-draw.jp/ijinden/cardlist/B01/card/B_013.png","expansion":11,"rarity":1,"type":4,"level":1,"color":2,"term":0,"trait":0,"legacy":3,"orderTable":26,"orderDeck":349},</text:p>
          </table:table-cell>
          <table:table-cell table:number-columns-repeated="16347"/>
        </table:table-row>
        <table:table-row table:style-name="ro2">
          <table:table-cell office:value-type="float" office:value="27" calcext:value-type="float">
            <text:p>27</text:p>
          </table:table-cell>
          <table:table-cell office:value-type="float" office:value="163" calcext:value-type="float">
            <text:p>163</text:p>
          </table:table-cell>
          <table:table-cell office:value-type="string" calcext:value-type="string">
            <text:p>G-1</text:p>
          </table:table-cell>
          <table:table-cell office:value-type="float" office:value="1" calcext:value-type="float">
            <text:p>1</text:p>
          </table:table-cell>
          <table:table-cell office:value-type="string" calcext:value-type="string">
            <text:p>出雲の阿国</text:p>
          </table:table-cell>
          <table:table-cell office:value-type="string" calcext:value-type="string">
            <text:p>いずものおくに</text:p>
          </table:table-cell>
          <table:table-cell office:value-type="string" calcext:value-type="string">
            <text:p>日本の大天才デッキ</text:p>
          </table:table-cell>
          <table:table-cell table:formula="of:=VLOOKUP([.G28];[$収録番号.$A$1:$収録番号.$B$9];2;0)" office:value-type="float" office:value="12" calcext:value-type="float">
            <text:p>12</text:p>
          </table:table-cell>
          <table:table-cell office:value-type="string" calcext:value-type="string">
            <text:p>SR</text:p>
          </table:table-cell>
          <table:table-cell table:formula="of:=VLOOKUP([.I28];[$レアリティ番号.$A$1:$レアリティ番号.$B$4];2;0)" office:value-type="float" office:value="4" calcext:value-type="float">
            <text:p>4</text:p>
          </table:table-cell>
          <table:table-cell office:value-type="string" calcext:value-type="string">
            <text:p>イジン</text:p>
          </table:table-cell>
          <table:table-cell table:formula="of:=VLOOKUP([.K28];[$種類番号.$A$1:$種類番号.$B$4];2;0)" office:value-type="float" office:value="1" calcext:value-type="float">
            <text:p>1</text:p>
          </table:table-cell>
          <table:table-cell office:value-type="string" calcext:value-type="string">
            <text:p>緑</text:p>
          </table:table-cell>
          <table:table-cell table:formula="of:=VLOOKUP([.M28];[$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8];[$特性番号.$A$1:$特性番号.$B$8];2;0);0)" office:value-type="float" office:value="0" calcext:value-type="float">
            <text:p>0</text:p>
          </table:table-cell>
          <table:table-cell office:value-type="string" calcext:value-type="string">
            <text:p>戦場に置かれたとき、自分の戦場のカードすべてを起こす。¶破壊されたとき、自分の魔力ゾーンのマリョク1つを裏にして発動できる。これを破壊されていない状態にする。</text:p>
          </table:table-cell>
          <table:table-cell table:style-name="ce8" office:value-type="string" calcext:value-type="string">
            <text:p>1ドローする</text:p>
          </table:table-cell>
          <table:table-cell table:formula="of:=IFERROR(VLOOKUP([.$V28];[$遺業能力番号.$A$1:$遺業能力番号.$B$9];2;0);0)" office:value-type="float" office:value="4" calcext:value-type="float">
            <text:p>4</text:p>
          </table:table-cell>
          <table:table-cell office:value-type="string" calcext:value-type="string">
            <text:p>https://one-draw.jp/ijinden/cardlist/G01/card/G_001.png</text:p>
          </table:table-cell>
          <table:table-cell table:formula="of:=CONCATENATE([$JSON.$A$1];[.$C28];[$JSON.$B$1];[.$E28];[$JSON.$C$1];[.$F28];[$JSON.$D$1];IF(ISNA([.$S28]);&quot;null&quot;;&quot;&quot;&quot;&quot;&amp;[.$S28]&amp;&quot;&quot;&quot;&quot;);[$JSON.$E$1];[.$U28];[$JSON.$F$1];IF(ISNA([.$V28]);&quot;null&quot;;&quot;&quot;&quot;&quot;&amp;[.$V28]&amp;&quot;&quot;&quot;&quot;);[$JSON.$G$1];[.$X28];[$JSON.$H$1];[.$H28];[$JSON.$I$1];[.J28];[$JSON.$J$1];[.$L28];[$JSON.$K$1];[.$O28];[$JSON.$L$1];[.$N28];[$JSON.$M$1];[.$R28];[$JSON.$N$1];[.$T28];[$JSON.$O$1];[.$W28];[$JSON.$P$1];[.$A28];[$JSON.$Q$1];[.$B28];[$JSON.$R$1])" office:value-type="string" office:string-value="{&quot;id&quot;:&quot;G-1&quot;,&quot;name&quot;:&quot;出雲の阿国&quot;,&quot;kana&quot;:&quot;いずものおくに&quot;,&quot;traitText&quot;:null,&quot;ruleText&quot;:&quot;戦場に置かれたとき、自分の戦場のカードすべてを起こす。¶破壊されたとき、自分の魔力ゾーンのマリョク1つを裏にして発動できる。これを破壊されていない状態にする。&quot;,&quot;legacyText&quot;:&quot;1ドローする&quot;,&quot;imageUrl&quot;:&quot;https://one-draw.jp/ijinden/cardlist/G01/card/G_001.png&quot;,&quot;expansion&quot;:12,&quot;rarity&quot;:4,&quot;type&quot;:1,&quot;level&quot;:5,&quot;color&quot;:4,&quot;term&quot;:0,&quot;trait&quot;:0,&quot;legacy&quot;:4,&quot;orderTable&quot;:27,&quot;orderDeck&quot;:163}," calcext:value-type="string">
            <text:p>{"id":"G-1","name":"出雲の阿国","kana":"いずものおくに","traitText":null,"ruleText":"戦場に置かれたとき、自分の戦場のカードすべてを起こす。¶破壊されたとき、自分の魔力ゾーンのマリョク1つを裏にして発動できる。これを破壊されていない状態にする。","legacyText":"1ドローする","imageUrl":"https://one-draw.jp/ijinden/cardlist/G01/card/G_001.png","expansion":12,"rarity":4,"type":1,"level":5,"color":4,"term":0,"trait":0,"legacy":4,"orderTable":27,"orderDeck":163},</text:p>
          </table:table-cell>
          <table:table-cell table:number-columns-repeated="16347"/>
        </table:table-row>
        <table:table-row table:style-name="ro2">
          <table:table-cell office:value-type="float" office:value="28" calcext:value-type="float">
            <text:p>28</text:p>
          </table:table-cell>
          <table:table-cell office:value-type="float" office:value="12" calcext:value-type="float">
            <text:p>12</text:p>
          </table:table-cell>
          <table:table-cell office:value-type="string" calcext:value-type="string">
            <text:p>G-2</text:p>
          </table:table-cell>
          <table:table-cell office:value-type="float" office:value="2" calcext:value-type="float">
            <text:p>2</text:p>
          </table:table-cell>
          <table:table-cell office:value-type="string" calcext:value-type="string">
            <text:p>卑弥呼</text:p>
          </table:table-cell>
          <table:table-cell office:value-type="string" calcext:value-type="string">
            <text:p>ひみこ</text:p>
          </table:table-cell>
          <table:table-cell office:value-type="string" calcext:value-type="string">
            <text:p>日本の大天才デッキ</text:p>
          </table:table-cell>
          <table:table-cell table:formula="of:=VLOOKUP([.G29];[$収録番号.$A$1:$収録番号.$B$9];2;0)" office:value-type="float" office:value="12" calcext:value-type="float">
            <text:p>12</text:p>
          </table:table-cell>
          <table:table-cell office:value-type="string" calcext:value-type="string">
            <text:p>N</text:p>
          </table:table-cell>
          <table:table-cell table:formula="of:=VLOOKUP([.I29];[$レアリティ番号.$A$1:$レアリティ番号.$B$4];2;0)" office:value-type="float" office:value="1" calcext:value-type="float">
            <text:p>1</text:p>
          </table:table-cell>
          <table:table-cell office:value-type="string" calcext:value-type="string">
            <text:p>イジン</text:p>
          </table:table-cell>
          <table:table-cell table:formula="of:=VLOOKUP([.K29];[$種類番号.$A$1:$種類番号.$B$4];2;0)" office:value-type="float" office:value="1" calcext:value-type="float">
            <text:p>1</text:p>
          </table:table-cell>
          <table:table-cell office:value-type="string" calcext:value-type="string">
            <text:p>緑</text:p>
          </table:table-cell>
          <table:table-cell table:formula="of:=VLOOKUP([.M29];[$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9];[$特性番号.$A$1:$特性番号.$B$8];2;0);0)" office:value-type="float" office:value="0" calcext:value-type="float">
            <text:p>0</text:p>
          </table:table-cell>
          <table:table-cell office:value-type="string" calcext:value-type="string">
            <text:p>戦場に置かれたとき、自分の山札の上から1枚を、裏のまま魔力ゾーンに置く。</text:p>
          </table:table-cell>
          <table:table-cell table:style-name="ce8" table:formula="of:=NA()" office:value-type="string" office:string-value="" calcext:value-type="error">
            <text:p>#N/A</text:p>
          </table:table-cell>
          <table:table-cell table:formula="of:=IFERROR(VLOOKUP([.$V29];[$遺業能力番号.$A$1:$遺業能力番号.$B$9];2;0);0)" office:value-type="float" office:value="0" calcext:value-type="float">
            <text:p>0</text:p>
          </table:table-cell>
          <table:table-cell office:value-type="string" calcext:value-type="string">
            <text:p>https://one-draw.jp/ijinden/cardlist/G01/card/G_002.png</text:p>
          </table:table-cell>
          <table:table-cell table:formula="of:=CONCATENATE([$JSON.$A$1];[.$C29];[$JSON.$B$1];[.$E29];[$JSON.$C$1];[.$F29];[$JSON.$D$1];IF(ISNA([.$S29]);&quot;null&quot;;&quot;&quot;&quot;&quot;&amp;[.$S29]&amp;&quot;&quot;&quot;&quot;);[$JSON.$E$1];[.$U29];[$JSON.$F$1];IF(ISNA([.$V29]);&quot;null&quot;;&quot;&quot;&quot;&quot;&amp;[.$V29]&amp;&quot;&quot;&quot;&quot;);[$JSON.$G$1];[.$X29];[$JSON.$H$1];[.$H29];[$JSON.$I$1];[.J29];[$JSON.$J$1];[.$L29];[$JSON.$K$1];[.$O29];[$JSON.$L$1];[.$N29];[$JSON.$M$1];[.$R29];[$JSON.$N$1];[.$T29];[$JSON.$O$1];[.$W29];[$JSON.$P$1];[.$A29];[$JSON.$Q$1];[.$B29];[$JSON.$R$1])" office:value-type="string" office:string-value="{&quot;id&quot;:&quot;G-2&quot;,&quot;name&quot;:&quot;卑弥呼&quot;,&quot;kana&quot;:&quot;ひみこ&quot;,&quot;traitText&quot;:null,&quot;ruleText&quot;:&quot;戦場に置かれたとき、自分の山札の上から1枚を、裏のまま魔力ゾーンに置く。&quot;,&quot;legacyText&quot;:null,&quot;imageUrl&quot;:&quot;https://one-draw.jp/ijinden/cardlist/G01/card/G_002.png&quot;,&quot;expansion&quot;:12,&quot;rarity&quot;:1,&quot;type&quot;:1,&quot;level&quot;:1,&quot;color&quot;:4,&quot;term&quot;:0,&quot;trait&quot;:0,&quot;legacy&quot;:0,&quot;orderTable&quot;:28,&quot;orderDeck&quot;:12}," calcext:value-type="string">
            <text:p>{"id":"G-2","name":"卑弥呼","kana":"ひみこ","traitText":null,"ruleText":"戦場に置かれたとき、自分の山札の上から1枚を、裏のまま魔力ゾーンに置く。","legacyText":null,"imageUrl":"https://one-draw.jp/ijinden/cardlist/G01/card/G_002.png","expansion":12,"rarity":1,"type":1,"level":1,"color":4,"term":0,"trait":0,"legacy":0,"orderTable":28,"orderDeck":12},</text:p>
          </table:table-cell>
          <table:table-cell table:number-columns-repeated="16347"/>
        </table:table-row>
        <table:table-row table:style-name="ro2">
          <table:table-cell office:value-type="float" office:value="29" calcext:value-type="float">
            <text:p>29</text:p>
          </table:table-cell>
          <table:table-cell office:value-type="float" office:value="84" calcext:value-type="float">
            <text:p>84</text:p>
          </table:table-cell>
          <table:table-cell office:value-type="string" calcext:value-type="string">
            <text:p>G-3</text:p>
          </table:table-cell>
          <table:table-cell office:value-type="float" office:value="3" calcext:value-type="float">
            <text:p>3</text:p>
          </table:table-cell>
          <table:table-cell office:value-type="string" calcext:value-type="string">
            <text:p>アテルイ</text:p>
          </table:table-cell>
          <table:table-cell office:value-type="string" calcext:value-type="string">
            <text:p>あてるい</text:p>
          </table:table-cell>
          <table:table-cell office:value-type="string" calcext:value-type="string">
            <text:p>日本の大天才デッキ</text:p>
          </table:table-cell>
          <table:table-cell table:formula="of:=VLOOKUP([.G30];[$収録番号.$A$1:$収録番号.$B$9];2;0)" office:value-type="float" office:value="12" calcext:value-type="float">
            <text:p>12</text:p>
          </table:table-cell>
          <table:table-cell office:value-type="string" calcext:value-type="string">
            <text:p>N</text:p>
          </table:table-cell>
          <table:table-cell table:formula="of:=VLOOKUP([.I30];[$レアリティ番号.$A$1:$レアリティ番号.$B$4];2;0)" office:value-type="float" office:value="1" calcext:value-type="float">
            <text:p>1</text:p>
          </table:table-cell>
          <table:table-cell office:value-type="string" calcext:value-type="string">
            <text:p>イジン</text:p>
          </table:table-cell>
          <table:table-cell table:formula="of:=VLOOKUP([.K30];[$種類番号.$A$1:$種類番号.$B$4];2;0)" office:value-type="float" office:value="1" calcext:value-type="float">
            <text:p>1</text:p>
          </table:table-cell>
          <table:table-cell office:value-type="string" calcext:value-type="string">
            <text:p>緑</text:p>
          </table:table-cell>
          <table:table-cell table:formula="of:=VLOOKUP([.M30];[$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0];[$特性番号.$A$1:$特性番号.$B$8];2;0);0)" office:value-type="float" office:value="0" calcext:value-type="float">
            <text:p>0</text:p>
          </table:table-cell>
          <table:table-cell office:value-type="string" calcext:value-type="string">
            <text:p>「剣術」イジンが戦場に置かれたとき、これを起こす。¶アタック+1000</text:p>
          </table:table-cell>
          <table:table-cell table:style-name="ce8" office:value-type="string" calcext:value-type="string">
            <text:p>1ドローする</text:p>
          </table:table-cell>
          <table:table-cell table:formula="of:=IFERROR(VLOOKUP([.$V30];[$遺業能力番号.$A$1:$遺業能力番号.$B$9];2;0);0)" office:value-type="float" office:value="4" calcext:value-type="float">
            <text:p>4</text:p>
          </table:table-cell>
          <table:table-cell office:value-type="string" calcext:value-type="string">
            <text:p>https://one-draw.jp/ijinden/cardlist/G01/card/G_003.png</text:p>
          </table:table-cell>
          <table:table-cell table:formula="of:=CONCATENATE([$JSON.$A$1];[.$C30];[$JSON.$B$1];[.$E30];[$JSON.$C$1];[.$F30];[$JSON.$D$1];IF(ISNA([.$S30]);&quot;null&quot;;&quot;&quot;&quot;&quot;&amp;[.$S30]&amp;&quot;&quot;&quot;&quot;);[$JSON.$E$1];[.$U30];[$JSON.$F$1];IF(ISNA([.$V30]);&quot;null&quot;;&quot;&quot;&quot;&quot;&amp;[.$V30]&amp;&quot;&quot;&quot;&quot;);[$JSON.$G$1];[.$X30];[$JSON.$H$1];[.$H30];[$JSON.$I$1];[.J30];[$JSON.$J$1];[.$L30];[$JSON.$K$1];[.$O30];[$JSON.$L$1];[.$N30];[$JSON.$M$1];[.$R30];[$JSON.$N$1];[.$T30];[$JSON.$O$1];[.$W30];[$JSON.$P$1];[.$A30];[$JSON.$Q$1];[.$B30];[$JSON.$R$1])" office:value-type="string" office:string-value="{&quot;id&quot;:&quot;G-3&quot;,&quot;name&quot;:&quot;アテルイ&quot;,&quot;kana&quot;:&quot;あてるい&quot;,&quot;traitText&quot;:null,&quot;ruleText&quot;:&quot;「剣術」イジンが戦場に置かれたとき、これを起こす。¶アタック+1000&quot;,&quot;legacyText&quot;:&quot;1ドローする&quot;,&quot;imageUrl&quot;:&quot;https://one-draw.jp/ijinden/cardlist/G01/card/G_003.png&quot;,&quot;expansion&quot;:12,&quot;rarity&quot;:1,&quot;type&quot;:1,&quot;level&quot;:3,&quot;color&quot;:4,&quot;term&quot;:0,&quot;trait&quot;:0,&quot;legacy&quot;:4,&quot;orderTable&quot;:29,&quot;orderDeck&quot;:84}," calcext:value-type="string">
            <text:p>{"id":"G-3","name":"アテルイ","kana":"あてるい","traitText":null,"ruleText":"「剣術」イジンが戦場に置かれたとき、これを起こす。¶アタック+1000","legacyText":"1ドローする","imageUrl":"https://one-draw.jp/ijinden/cardlist/G01/card/G_003.png","expansion":12,"rarity":1,"type":1,"level":3,"color":4,"term":0,"trait":0,"legacy":4,"orderTable":29,"orderDeck":84},</text:p>
          </table:table-cell>
          <table:table-cell table:number-columns-repeated="16347"/>
        </table:table-row>
        <table:table-row table:style-name="ro2">
          <table:table-cell office:value-type="float" office:value="30" calcext:value-type="float">
            <text:p>30</text:p>
          </table:table-cell>
          <table:table-cell office:value-type="float" office:value="44" calcext:value-type="float">
            <text:p>44</text:p>
          </table:table-cell>
          <table:table-cell office:value-type="string" calcext:value-type="string">
            <text:p>G-4</text:p>
          </table:table-cell>
          <table:table-cell office:value-type="float" office:value="4" calcext:value-type="float">
            <text:p>4</text:p>
          </table:table-cell>
          <table:table-cell office:value-type="string" calcext:value-type="string">
            <text:p>紀貫之</text:p>
          </table:table-cell>
          <table:table-cell office:value-type="string" calcext:value-type="string">
            <text:p>きのつらゆき</text:p>
          </table:table-cell>
          <table:table-cell office:value-type="string" calcext:value-type="string">
            <text:p>日本の大天才デッキ</text:p>
          </table:table-cell>
          <table:table-cell table:formula="of:=VLOOKUP([.G31];[$収録番号.$A$1:$収録番号.$B$9];2;0)" office:value-type="float" office:value="12" calcext:value-type="float">
            <text:p>12</text:p>
          </table:table-cell>
          <table:table-cell office:value-type="string" calcext:value-type="string">
            <text:p>N</text:p>
          </table:table-cell>
          <table:table-cell table:formula="of:=VLOOKUP([.I31];[$レアリティ番号.$A$1:$レアリティ番号.$B$4];2;0)" office:value-type="float" office:value="1" calcext:value-type="float">
            <text:p>1</text:p>
          </table:table-cell>
          <table:table-cell office:value-type="string" calcext:value-type="string">
            <text:p>イジン</text:p>
          </table:table-cell>
          <table:table-cell table:formula="of:=VLOOKUP([.K31];[$種類番号.$A$1:$種類番号.$B$4];2;0)" office:value-type="float" office:value="1" calcext:value-type="float">
            <text:p>1</text:p>
          </table:table-cell>
          <table:table-cell office:value-type="string" calcext:value-type="string">
            <text:p>緑</text:p>
          </table:table-cell>
          <table:table-cell table:formula="of:=VLOOKUP([.M31];[$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執筆</text:p>
          </table:table-cell>
          <table:table-cell table:formula="of:=IFERROR(VLOOKUP([.$Q31];[$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31];[$特性番号.$A$1:$特性番号.$B$8];2;0);0)" office:value-type="float" office:value="0" calcext:value-type="float">
            <text:p>0</text:p>
          </table:table-cell>
          <table:table-cell office:value-type="string" calcext:value-type="string">
            <text:p>執筆 - ハイケイが戦場に置かれたとき、これを裏にして魔力ゾーンに置く。</text:p>
          </table:table-cell>
          <table:table-cell table:style-name="ce8" office:value-type="string" calcext:value-type="string">
            <text:p>1ドローする</text:p>
          </table:table-cell>
          <table:table-cell table:formula="of:=IFERROR(VLOOKUP([.$V31];[$遺業能力番号.$A$1:$遺業能力番号.$B$9];2;0);0)" office:value-type="float" office:value="4" calcext:value-type="float">
            <text:p>4</text:p>
          </table:table-cell>
          <table:table-cell office:value-type="string" calcext:value-type="string">
            <text:p>https://one-draw.jp/ijinden/cardlist/G01/card/G_004.png</text:p>
          </table:table-cell>
          <table:table-cell table:formula="of:=CONCATENATE([$JSON.$A$1];[.$C31];[$JSON.$B$1];[.$E31];[$JSON.$C$1];[.$F31];[$JSON.$D$1];IF(ISNA([.$S31]);&quot;null&quot;;&quot;&quot;&quot;&quot;&amp;[.$S31]&amp;&quot;&quot;&quot;&quot;);[$JSON.$E$1];[.$U31];[$JSON.$F$1];IF(ISNA([.$V31]);&quot;null&quot;;&quot;&quot;&quot;&quot;&amp;[.$V31]&amp;&quot;&quot;&quot;&quot;);[$JSON.$G$1];[.$X31];[$JSON.$H$1];[.$H31];[$JSON.$I$1];[.J31];[$JSON.$J$1];[.$L31];[$JSON.$K$1];[.$O31];[$JSON.$L$1];[.$N31];[$JSON.$M$1];[.$R31];[$JSON.$N$1];[.$T31];[$JSON.$O$1];[.$W31];[$JSON.$P$1];[.$A31];[$JSON.$Q$1];[.$B31];[$JSON.$R$1])" office:value-type="string" office:string-value="{&quot;id&quot;:&quot;G-4&quot;,&quot;name&quot;:&quot;紀貫之&quot;,&quot;kana&quot;:&quot;きのつらゆき&quot;,&quot;traitText&quot;:null,&quot;ruleText&quot;:&quot;執筆 - ハイケイが戦場に置かれたとき、これを裏にして魔力ゾーンに置く。&quot;,&quot;legacyText&quot;:&quot;1ドローする&quot;,&quot;imageUrl&quot;:&quot;https://one-draw.jp/ijinden/cardlist/G01/card/G_004.png&quot;,&quot;expansion&quot;:12,&quot;rarity&quot;:1,&quot;type&quot;:1,&quot;level&quot;:2,&quot;color&quot;:4,&quot;term&quot;:2,&quot;trait&quot;:0,&quot;legacy&quot;:4,&quot;orderTable&quot;:30,&quot;orderDeck&quot;:44}," calcext:value-type="string">
            <text:p>{"id":"G-4","name":"紀貫之","kana":"きのつらゆき","traitText":null,"ruleText":"執筆 - ハイケイが戦場に置かれたとき、これを裏にして魔力ゾーンに置く。","legacyText":"1ドローする","imageUrl":"https://one-draw.jp/ijinden/cardlist/G01/card/G_004.png","expansion":12,"rarity":1,"type":1,"level":2,"color":4,"term":2,"trait":0,"legacy":4,"orderTable":30,"orderDeck":44},</text:p>
          </table:table-cell>
          <table:table-cell table:number-columns-repeated="16347"/>
        </table:table-row>
        <table:table-row table:style-name="ro2">
          <table:table-cell office:value-type="float" office:value="31" calcext:value-type="float">
            <text:p>31</text:p>
          </table:table-cell>
          <table:table-cell office:value-type="float" office:value="123" calcext:value-type="float">
            <text:p>123</text:p>
          </table:table-cell>
          <table:table-cell office:value-type="string" calcext:value-type="string">
            <text:p>G-5</text:p>
          </table:table-cell>
          <table:table-cell office:value-type="float" office:value="5" calcext:value-type="float">
            <text:p>5</text:p>
          </table:table-cell>
          <table:table-cell office:value-type="string" calcext:value-type="string">
            <text:p>阿倍仲麻呂</text:p>
          </table:table-cell>
          <table:table-cell office:value-type="string" calcext:value-type="string">
            <text:p>あべのなかまろ</text:p>
          </table:table-cell>
          <table:table-cell office:value-type="string" calcext:value-type="string">
            <text:p>日本の大天才デッキ</text:p>
          </table:table-cell>
          <table:table-cell table:formula="of:=VLOOKUP([.G32];[$収録番号.$A$1:$収録番号.$B$9];2;0)" office:value-type="float" office:value="12" calcext:value-type="float">
            <text:p>12</text:p>
          </table:table-cell>
          <table:table-cell office:value-type="string" calcext:value-type="string">
            <text:p>N</text:p>
          </table:table-cell>
          <table:table-cell table:formula="of:=VLOOKUP([.I32];[$レアリティ番号.$A$1:$レアリティ番号.$B$4];2;0)" office:value-type="float" office:value="1" calcext:value-type="float">
            <text:p>1</text:p>
          </table:table-cell>
          <table:table-cell office:value-type="string" calcext:value-type="string">
            <text:p>イジン</text:p>
          </table:table-cell>
          <table:table-cell table:formula="of:=VLOOKUP([.K32];[$種類番号.$A$1:$種類番号.$B$4];2;0)" office:value-type="float" office:value="1" calcext:value-type="float">
            <text:p>1</text:p>
          </table:table-cell>
          <table:table-cell office:value-type="string" calcext:value-type="string">
            <text:p>緑</text:p>
          </table:table-cell>
          <table:table-cell table:formula="of:=VLOOKUP([.M32];[$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2];[$特性番号.$A$1:$特性番号.$B$8];2;0);0)" office:value-type="float" office:value="0" calcext:value-type="float">
            <text:p>0</text:p>
          </table:table-cell>
          <table:table-cell office:value-type="string" calcext:value-type="string">
            <text:p>「航海」が発動したとき、1ドローして、これを起こす。</text:p>
          </table:table-cell>
          <table:table-cell table:style-name="ce8" table:formula="of:=NA()" office:value-type="string" office:string-value="" calcext:value-type="error">
            <text:p>#N/A</text:p>
          </table:table-cell>
          <table:table-cell table:formula="of:=IFERROR(VLOOKUP([.$V32];[$遺業能力番号.$A$1:$遺業能力番号.$B$9];2;0);0)" office:value-type="float" office:value="0" calcext:value-type="float">
            <text:p>0</text:p>
          </table:table-cell>
          <table:table-cell office:value-type="string" calcext:value-type="string">
            <text:p>https://one-draw.jp/ijinden/cardlist/G01/card/G_005.png</text:p>
          </table:table-cell>
          <table:table-cell table:formula="of:=CONCATENATE([$JSON.$A$1];[.$C32];[$JSON.$B$1];[.$E32];[$JSON.$C$1];[.$F32];[$JSON.$D$1];IF(ISNA([.$S32]);&quot;null&quot;;&quot;&quot;&quot;&quot;&amp;[.$S32]&amp;&quot;&quot;&quot;&quot;);[$JSON.$E$1];[.$U32];[$JSON.$F$1];IF(ISNA([.$V32]);&quot;null&quot;;&quot;&quot;&quot;&quot;&amp;[.$V32]&amp;&quot;&quot;&quot;&quot;);[$JSON.$G$1];[.$X32];[$JSON.$H$1];[.$H32];[$JSON.$I$1];[.J32];[$JSON.$J$1];[.$L32];[$JSON.$K$1];[.$O32];[$JSON.$L$1];[.$N32];[$JSON.$M$1];[.$R32];[$JSON.$N$1];[.$T32];[$JSON.$O$1];[.$W32];[$JSON.$P$1];[.$A32];[$JSON.$Q$1];[.$B32];[$JSON.$R$1])" office:value-type="string" office:string-value="{&quot;id&quot;:&quot;G-5&quot;,&quot;name&quot;:&quot;阿倍仲麻呂&quot;,&quot;kana&quot;:&quot;あべのなかまろ&quot;,&quot;traitText&quot;:null,&quot;ruleText&quot;:&quot;「航海」が発動したとき、1ドローして、これを起こす。&quot;,&quot;legacyText&quot;:null,&quot;imageUrl&quot;:&quot;https://one-draw.jp/ijinden/cardlist/G01/card/G_005.png&quot;,&quot;expansion&quot;:12,&quot;rarity&quot;:1,&quot;type&quot;:1,&quot;level&quot;:4,&quot;color&quot;:4,&quot;term&quot;:0,&quot;trait&quot;:0,&quot;legacy&quot;:0,&quot;orderTable&quot;:31,&quot;orderDeck&quot;:123}," calcext:value-type="string">
            <text:p>{"id":"G-5","name":"阿倍仲麻呂","kana":"あべのなかまろ","traitText":null,"ruleText":"「航海」が発動したとき、1ドローして、これを起こす。","legacyText":null,"imageUrl":"https://one-draw.jp/ijinden/cardlist/G01/card/G_005.png","expansion":12,"rarity":1,"type":1,"level":4,"color":4,"term":0,"trait":0,"legacy":0,"orderTable":31,"orderDeck":123},</text:p>
          </table:table-cell>
          <table:table-cell table:number-columns-repeated="16347"/>
        </table:table-row>
        <table:table-row table:style-name="ro2">
          <table:table-cell office:value-type="float" office:value="32" calcext:value-type="float">
            <text:p>32</text:p>
          </table:table-cell>
          <table:table-cell office:value-type="float" office:value="85" calcext:value-type="float">
            <text:p>85</text:p>
          </table:table-cell>
          <table:table-cell office:value-type="string" calcext:value-type="string">
            <text:p>G-6</text:p>
          </table:table-cell>
          <table:table-cell office:value-type="float" office:value="6" calcext:value-type="float">
            <text:p>6</text:p>
          </table:table-cell>
          <table:table-cell office:value-type="string" calcext:value-type="string">
            <text:p>葛飾北斎</text:p>
          </table:table-cell>
          <table:table-cell office:value-type="string" calcext:value-type="string">
            <text:p>かつしかほくさい</text:p>
          </table:table-cell>
          <table:table-cell office:value-type="string" calcext:value-type="string">
            <text:p>日本の大天才デッキ</text:p>
          </table:table-cell>
          <table:table-cell table:formula="of:=VLOOKUP([.G33];[$収録番号.$A$1:$収録番号.$B$9];2;0)" office:value-type="float" office:value="12" calcext:value-type="float">
            <text:p>12</text:p>
          </table:table-cell>
          <table:table-cell office:value-type="string" calcext:value-type="string">
            <text:p>N</text:p>
          </table:table-cell>
          <table:table-cell table:formula="of:=VLOOKUP([.I33];[$レアリティ番号.$A$1:$レアリティ番号.$B$4];2;0)" office:value-type="float" office:value="1" calcext:value-type="float">
            <text:p>1</text:p>
          </table:table-cell>
          <table:table-cell office:value-type="string" calcext:value-type="string">
            <text:p>イジン</text:p>
          </table:table-cell>
          <table:table-cell table:formula="of:=VLOOKUP([.K33];[$種類番号.$A$1:$種類番号.$B$4];2;0)" office:value-type="float" office:value="1" calcext:value-type="float">
            <text:p>1</text:p>
          </table:table-cell>
          <table:table-cell office:value-type="string" calcext:value-type="string">
            <text:p>緑</text:p>
          </table:table-cell>
          <table:table-cell table:formula="of:=VLOOKUP([.M33];[$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3];[$能力語番号.$A$1:$能力語番号.$B$10];2;0);0)" office:value-type="float" office:value="0" calcext:value-type="float">
            <text:p>0</text:p>
          </table:table-cell>
          <table:table-cell office:value-type="string" calcext:value-type="string">
            <text:p>美術</text:p>
          </table:table-cell>
          <table:table-cell table:formula="of:=IFERROR(VLOOKUP([.$S33];[$特性番号.$A$1:$特性番号.$B$8];2;0);0)" office:value-type="float" office:value="2" calcext:value-type="float">
            <text:p>2</text:p>
          </table:table-cell>
          <table:table-cell office:value-type="string" calcext:value-type="string">
            <text:p>戦場に置かれたとき、自分の墓地のハイケイ1つか2つを指定して発動できる。それらのハイケイすべてを手札に戻す。</text:p>
          </table:table-cell>
          <table:table-cell table:style-name="ce8" office:value-type="string" calcext:value-type="string">
            <text:p>1ドローする</text:p>
          </table:table-cell>
          <table:table-cell table:formula="of:=IFERROR(VLOOKUP([.$V33];[$遺業能力番号.$A$1:$遺業能力番号.$B$9];2;0);0)" office:value-type="float" office:value="4" calcext:value-type="float">
            <text:p>4</text:p>
          </table:table-cell>
          <table:table-cell office:value-type="string" calcext:value-type="string">
            <text:p>https://one-draw.jp/ijinden/cardlist/G01/card/G_006.png</text:p>
          </table:table-cell>
          <table:table-cell table:formula="of:=CONCATENATE([$JSON.$A$1];[.$C33];[$JSON.$B$1];[.$E33];[$JSON.$C$1];[.$F33];[$JSON.$D$1];IF(ISNA([.$S33]);&quot;null&quot;;&quot;&quot;&quot;&quot;&amp;[.$S33]&amp;&quot;&quot;&quot;&quot;);[$JSON.$E$1];[.$U33];[$JSON.$F$1];IF(ISNA([.$V33]);&quot;null&quot;;&quot;&quot;&quot;&quot;&amp;[.$V33]&amp;&quot;&quot;&quot;&quot;);[$JSON.$G$1];[.$X33];[$JSON.$H$1];[.$H33];[$JSON.$I$1];[.J33];[$JSON.$J$1];[.$L33];[$JSON.$K$1];[.$O33];[$JSON.$L$1];[.$N33];[$JSON.$M$1];[.$R33];[$JSON.$N$1];[.$T33];[$JSON.$O$1];[.$W33];[$JSON.$P$1];[.$A33];[$JSON.$Q$1];[.$B33];[$JSON.$R$1])" office:value-type="string" office:string-value="{&quot;id&quot;:&quot;G-6&quot;,&quot;name&quot;:&quot;葛飾北斎&quot;,&quot;kana&quot;:&quot;かつしかほくさい&quot;,&quot;traitText&quot;:&quot;美術&quot;,&quot;ruleText&quot;:&quot;戦場に置かれたとき、自分の墓地のハイケイ1つか2つを指定して発動できる。それらのハイケイすべてを手札に戻す。&quot;,&quot;legacyText&quot;:&quot;1ドローする&quot;,&quot;imageUrl&quot;:&quot;https://one-draw.jp/ijinden/cardlist/G01/card/G_006.png&quot;,&quot;expansion&quot;:12,&quot;rarity&quot;:1,&quot;type&quot;:1,&quot;level&quot;:3,&quot;color&quot;:4,&quot;term&quot;:0,&quot;trait&quot;:2,&quot;legacy&quot;:4,&quot;orderTable&quot;:32,&quot;orderDeck&quot;:85}," calcext:value-type="string">
            <text:p>{"id":"G-6","name":"葛飾北斎","kana":"かつしかほくさい","traitText":"美術","ruleText":"戦場に置かれたとき、自分の墓地のハイケイ1つか2つを指定して発動できる。それらのハイケイすべてを手札に戻す。","legacyText":"1ドローする","imageUrl":"https://one-draw.jp/ijinden/cardlist/G01/card/G_006.png","expansion":12,"rarity":1,"type":1,"level":3,"color":4,"term":0,"trait":2,"legacy":4,"orderTable":32,"orderDeck":85},</text:p>
          </table:table-cell>
          <table:table-cell table:number-columns-repeated="16347"/>
        </table:table-row>
        <table:table-row table:style-name="ro2">
          <table:table-cell office:value-type="float" office:value="33" calcext:value-type="float">
            <text:p>33</text:p>
          </table:table-cell>
          <table:table-cell office:value-type="float" office:value="124" calcext:value-type="float">
            <text:p>124</text:p>
          </table:table-cell>
          <table:table-cell office:value-type="string" calcext:value-type="string">
            <text:p>G-7</text:p>
          </table:table-cell>
          <table:table-cell office:value-type="float" office:value="7" calcext:value-type="float">
            <text:p>7</text:p>
          </table:table-cell>
          <table:table-cell office:value-type="string" calcext:value-type="string">
            <text:p>藤原定家</text:p>
          </table:table-cell>
          <table:table-cell office:value-type="string" calcext:value-type="string">
            <text:p>ふじわらのていか</text:p>
          </table:table-cell>
          <table:table-cell office:value-type="string" calcext:value-type="string">
            <text:p>日本の大天才デッキ</text:p>
          </table:table-cell>
          <table:table-cell table:formula="of:=VLOOKUP([.G34];[$収録番号.$A$1:$収録番号.$B$9];2;0)" office:value-type="float" office:value="12" calcext:value-type="float">
            <text:p>12</text:p>
          </table:table-cell>
          <table:table-cell office:value-type="string" calcext:value-type="string">
            <text:p>N</text:p>
          </table:table-cell>
          <table:table-cell table:formula="of:=VLOOKUP([.I34];[$レアリティ番号.$A$1:$レアリティ番号.$B$4];2;0)" office:value-type="float" office:value="1" calcext:value-type="float">
            <text:p>1</text:p>
          </table:table-cell>
          <table:table-cell office:value-type="string" calcext:value-type="string">
            <text:p>イジン</text:p>
          </table:table-cell>
          <table:table-cell table:formula="of:=VLOOKUP([.K34];[$種類番号.$A$1:$種類番号.$B$4];2;0)" office:value-type="float" office:value="1" calcext:value-type="float">
            <text:p>1</text:p>
          </table:table-cell>
          <table:table-cell office:value-type="string" calcext:value-type="string">
            <text:p>緑</text:p>
          </table:table-cell>
          <table:table-cell table:formula="of:=VLOOKUP([.M34];[$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office:value-type="string" calcext:value-type="string">
            <text:p>執筆</text:p>
          </table:table-cell>
          <table:table-cell table:formula="of:=IFERROR(VLOOKUP([.$Q34];[$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34];[$特性番号.$A$1:$特性番号.$B$8];2;0);0)" office:value-type="float" office:value="0" calcext:value-type="float">
            <text:p>0</text:p>
          </table:table-cell>
          <table:table-cell office:value-type="string" calcext:value-type="string">
            <text:p>執筆 - ハイケイが戦場に置かれたとき、自分の戦場のカードすべてを起こす。</text:p>
          </table:table-cell>
          <table:table-cell table:style-name="ce8" table:formula="of:=NA()" office:value-type="string" office:string-value="" calcext:value-type="error">
            <text:p>#N/A</text:p>
          </table:table-cell>
          <table:table-cell table:formula="of:=IFERROR(VLOOKUP([.$V34];[$遺業能力番号.$A$1:$遺業能力番号.$B$9];2;0);0)" office:value-type="float" office:value="0" calcext:value-type="float">
            <text:p>0</text:p>
          </table:table-cell>
          <table:table-cell office:value-type="string" calcext:value-type="string">
            <text:p>https://one-draw.jp/ijinden/cardlist/G01/card/G_007.png</text:p>
          </table:table-cell>
          <table:table-cell table:formula="of:=CONCATENATE([$JSON.$A$1];[.$C34];[$JSON.$B$1];[.$E34];[$JSON.$C$1];[.$F34];[$JSON.$D$1];IF(ISNA([.$S34]);&quot;null&quot;;&quot;&quot;&quot;&quot;&amp;[.$S34]&amp;&quot;&quot;&quot;&quot;);[$JSON.$E$1];[.$U34];[$JSON.$F$1];IF(ISNA([.$V34]);&quot;null&quot;;&quot;&quot;&quot;&quot;&amp;[.$V34]&amp;&quot;&quot;&quot;&quot;);[$JSON.$G$1];[.$X34];[$JSON.$H$1];[.$H34];[$JSON.$I$1];[.J34];[$JSON.$J$1];[.$L34];[$JSON.$K$1];[.$O34];[$JSON.$L$1];[.$N34];[$JSON.$M$1];[.$R34];[$JSON.$N$1];[.$T34];[$JSON.$O$1];[.$W34];[$JSON.$P$1];[.$A34];[$JSON.$Q$1];[.$B34];[$JSON.$R$1])" office:value-type="string" office:string-value="{&quot;id&quot;:&quot;G-7&quot;,&quot;name&quot;:&quot;藤原定家&quot;,&quot;kana&quot;:&quot;ふじわらのていか&quot;,&quot;traitText&quot;:null,&quot;ruleText&quot;:&quot;執筆 - ハイケイが戦場に置かれたとき、自分の戦場のカードすべてを起こす。&quot;,&quot;legacyText&quot;:null,&quot;imageUrl&quot;:&quot;https://one-draw.jp/ijinden/cardlist/G01/card/G_007.png&quot;,&quot;expansion&quot;:12,&quot;rarity&quot;:1,&quot;type&quot;:1,&quot;level&quot;:4,&quot;color&quot;:4,&quot;term&quot;:2,&quot;trait&quot;:0,&quot;legacy&quot;:0,&quot;orderTable&quot;:33,&quot;orderDeck&quot;:124}," calcext:value-type="string">
            <text:p>{"id":"G-7","name":"藤原定家","kana":"ふじわらのていか","traitText":null,"ruleText":"執筆 - ハイケイが戦場に置かれたとき、自分の戦場のカードすべてを起こす。","legacyText":null,"imageUrl":"https://one-draw.jp/ijinden/cardlist/G01/card/G_007.png","expansion":12,"rarity":1,"type":1,"level":4,"color":4,"term":2,"trait":0,"legacy":0,"orderTable":33,"orderDeck":124},</text:p>
          </table:table-cell>
          <table:table-cell table:number-columns-repeated="16347"/>
        </table:table-row>
        <table:table-row table:style-name="ro2">
          <table:table-cell office:value-type="float" office:value="34" calcext:value-type="float">
            <text:p>34</text:p>
          </table:table-cell>
          <table:table-cell office:value-type="float" office:value="221" calcext:value-type="float">
            <text:p>221</text:p>
          </table:table-cell>
          <table:table-cell office:value-type="string" calcext:value-type="string">
            <text:p>G-8</text:p>
          </table:table-cell>
          <table:table-cell office:value-type="float" office:value="8" calcext:value-type="float">
            <text:p>8</text:p>
          </table:table-cell>
          <table:table-cell office:value-type="string" calcext:value-type="string">
            <text:p>最澄</text:p>
          </table:table-cell>
          <table:table-cell office:value-type="string" calcext:value-type="string">
            <text:p>さいちょう</text:p>
          </table:table-cell>
          <table:table-cell office:value-type="string" calcext:value-type="string">
            <text:p>日本の大天才デッキ</text:p>
          </table:table-cell>
          <table:table-cell table:formula="of:=VLOOKUP([.G35];[$収録番号.$A$1:$収録番号.$B$9];2;0)" office:value-type="float" office:value="12" calcext:value-type="float">
            <text:p>12</text:p>
          </table:table-cell>
          <table:table-cell office:value-type="string" calcext:value-type="string">
            <text:p>N</text:p>
          </table:table-cell>
          <table:table-cell table:formula="of:=VLOOKUP([.I35];[$レアリティ番号.$A$1:$レアリティ番号.$B$4];2;0)" office:value-type="float" office:value="1" calcext:value-type="float">
            <text:p>1</text:p>
          </table:table-cell>
          <table:table-cell office:value-type="string" calcext:value-type="string">
            <text:p>イジン</text:p>
          </table:table-cell>
          <table:table-cell table:formula="of:=VLOOKUP([.K35];[$種類番号.$A$1:$種類番号.$B$4];2;0)" office:value-type="float" office:value="1" calcext:value-type="float">
            <text:p>1</text:p>
          </table:table-cell>
          <table:table-cell office:value-type="string" calcext:value-type="string">
            <text:p>緑</text:p>
          </table:table-cell>
          <table:table-cell table:formula="of:=VLOOKUP([.M35];[$色番号.$A$1:$色番号.$B$10];2;0)" office:value-type="float" office:value="4" calcext:value-type="float">
            <text:p>4</text:p>
          </table:table-cell>
          <table:table-cell office:value-type="float" office:value="8" calcext:value-type="float">
            <text:p>8</text:p>
          </table:table-cell>
          <table:table-cell table:formula="of:=NA()" office:value-type="string" office:string-value="" calcext:value-type="error">
            <text:p>#N/A</text:p>
          </table:table-cell>
          <table:table-cell office:value-type="string" calcext:value-type="string">
            <text:p>航海</text:p>
          </table:table-cell>
          <table:table-cell table:formula="of:=IFERROR(VLOOKUP([.$Q35];[$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35];[$特性番号.$A$1:$特性番号.$B$8];2;0);0)" office:value-type="float" office:value="0" calcext:value-type="float">
            <text:p>0</text:p>
          </table:table-cell>
          <table:table-cell office:value-type="string" calcext:value-type="string">
            <text:p>航海 - アタッカーになったとき、自分の戦場のハイケイ1つを指定して発動できる。そのハイケイを手札に戻す。自分の戦場のイジンは、このターンの間「ダブルプレッシャー」を得る。</text:p>
          </table:table-cell>
          <table:table-cell table:style-name="ce8" office:value-type="string" calcext:value-type="string">
            <text:p>魔力化</text:p>
          </table:table-cell>
          <table:table-cell table:formula="of:=IFERROR(VLOOKUP([.$V35];[$遺業能力番号.$A$1:$遺業能力番号.$B$9];2;0);0)" office:value-type="float" office:value="1" calcext:value-type="float">
            <text:p>1</text:p>
          </table:table-cell>
          <table:table-cell office:value-type="string" calcext:value-type="string">
            <text:p>https://one-draw.jp/ijinden/cardlist/G01/card/G_008.png</text:p>
          </table:table-cell>
          <table:table-cell table:formula="of:=CONCATENATE([$JSON.$A$1];[.$C35];[$JSON.$B$1];[.$E35];[$JSON.$C$1];[.$F35];[$JSON.$D$1];IF(ISNA([.$S35]);&quot;null&quot;;&quot;&quot;&quot;&quot;&amp;[.$S35]&amp;&quot;&quot;&quot;&quot;);[$JSON.$E$1];[.$U35];[$JSON.$F$1];IF(ISNA([.$V35]);&quot;null&quot;;&quot;&quot;&quot;&quot;&amp;[.$V35]&amp;&quot;&quot;&quot;&quot;);[$JSON.$G$1];[.$X35];[$JSON.$H$1];[.$H35];[$JSON.$I$1];[.J35];[$JSON.$J$1];[.$L35];[$JSON.$K$1];[.$O35];[$JSON.$L$1];[.$N35];[$JSON.$M$1];[.$R35];[$JSON.$N$1];[.$T35];[$JSON.$O$1];[.$W35];[$JSON.$P$1];[.$A35];[$JSON.$Q$1];[.$B35];[$JSON.$R$1])" office:value-type="string" office:string-value="{&quot;id&quot;:&quot;G-8&quot;,&quot;name&quot;:&quot;最澄&quot;,&quot;kana&quot;:&quot;さいちょう&quot;,&quot;traitText&quot;:null,&quot;ruleText&quot;:&quot;航海 - アタッカーになったとき、自分の戦場のハイケイ1つを指定して発動できる。そのハイケイを手札に戻す。自分の戦場のイジンは、このターンの間「ダブルプレッシャー」を得る。&quot;,&quot;legacyText&quot;:&quot;魔力化&quot;,&quot;imageUrl&quot;:&quot;https://one-draw.jp/ijinden/cardlist/G01/card/G_008.png&quot;,&quot;expansion&quot;:12,&quot;rarity&quot;:1,&quot;type&quot;:1,&quot;level&quot;:8,&quot;color&quot;:4,&quot;term&quot;:1,&quot;trait&quot;:0,&quot;legacy&quot;:1,&quot;orderTable&quot;:34,&quot;orderDeck&quot;:221}," calcext:value-type="string">
            <text:p>{"id":"G-8","name":"最澄","kana":"さいちょう","traitText":null,"ruleText":"航海 - アタッカーになったとき、自分の戦場のハイケイ1つを指定して発動できる。そのハイケイを手札に戻す。自分の戦場のイジンは、このターンの間「ダブルプレッシャー」を得る。","legacyText":"魔力化","imageUrl":"https://one-draw.jp/ijinden/cardlist/G01/card/G_008.png","expansion":12,"rarity":1,"type":1,"level":8,"color":4,"term":1,"trait":0,"legacy":1,"orderTable":34,"orderDeck":221},</text:p>
          </table:table-cell>
          <table:table-cell table:number-columns-repeated="16347"/>
        </table:table-row>
        <table:table-row table:style-name="ro2">
          <table:table-cell office:value-type="float" office:value="35" calcext:value-type="float">
            <text:p>35</text:p>
          </table:table-cell>
          <table:table-cell office:value-type="float" office:value="263" calcext:value-type="float">
            <text:p>263</text:p>
          </table:table-cell>
          <table:table-cell office:value-type="string" calcext:value-type="string">
            <text:p>G-9</text:p>
          </table:table-cell>
          <table:table-cell office:value-type="float" office:value="9" calcext:value-type="float">
            <text:p>9</text:p>
          </table:table-cell>
          <table:table-cell office:value-type="string" calcext:value-type="string">
            <text:p>阿弥陀堂</text:p>
          </table:table-cell>
          <table:table-cell office:value-type="string" calcext:value-type="string">
            <text:p>あみだどう</text:p>
          </table:table-cell>
          <table:table-cell office:value-type="string" calcext:value-type="string">
            <text:p>日本の大天才デッキ</text:p>
          </table:table-cell>
          <table:table-cell table:formula="of:=VLOOKUP([.G36];[$収録番号.$A$1:$収録番号.$B$9];2;0)" office:value-type="float" office:value="12" calcext:value-type="float">
            <text:p>12</text:p>
          </table:table-cell>
          <table:table-cell office:value-type="string" calcext:value-type="string">
            <text:p>N</text:p>
          </table:table-cell>
          <table:table-cell table:formula="of:=VLOOKUP([.I36];[$レアリティ番号.$A$1:$レアリティ番号.$B$4];2;0)" office:value-type="float" office:value="1" calcext:value-type="float">
            <text:p>1</text:p>
          </table:table-cell>
          <table:table-cell office:value-type="string" calcext:value-type="string">
            <text:p>ハイケイ</text:p>
          </table:table-cell>
          <table:table-cell table:formula="of:=VLOOKUP([.K36];[$種類番号.$A$1:$種類番号.$B$4];2;0)" office:value-type="float" office:value="2" calcext:value-type="float">
            <text:p>2</text:p>
          </table:table-cell>
          <table:table-cell office:value-type="string" calcext:value-type="string">
            <text:p>緑</text:p>
          </table:table-cell>
          <table:table-cell table:formula="of:=VLOOKUP([.M36];[$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6];[$特性番号.$A$1:$特性番号.$B$8];2;0);0)" office:value-type="float" office:value="0" calcext:value-type="float">
            <text:p>0</text:p>
          </table:table-cell>
          <table:table-cell office:value-type="string" calcext:value-type="string">
            <text:p>自分のメインフェイズが開始したとき、自分の戦場のカード1つか、自分の魔力ゾーンのカード1つを指定して発動できる。そのカードを手札に戻す。</text:p>
          </table:table-cell>
          <table:table-cell table:style-name="ce8" table:formula="of:=NA()" office:value-type="string" office:string-value="" calcext:value-type="error">
            <text:p>#N/A</text:p>
          </table:table-cell>
          <table:table-cell table:formula="of:=IFERROR(VLOOKUP([.$V36];[$遺業能力番号.$A$1:$遺業能力番号.$B$9];2;0);0)" office:value-type="float" office:value="0" calcext:value-type="float">
            <text:p>0</text:p>
          </table:table-cell>
          <table:table-cell office:value-type="string" calcext:value-type="string">
            <text:p>https://one-draw.jp/ijinden/cardlist/G01/card/G_009.png</text:p>
          </table:table-cell>
          <table:table-cell table:formula="of:=CONCATENATE([$JSON.$A$1];[.$C36];[$JSON.$B$1];[.$E36];[$JSON.$C$1];[.$F36];[$JSON.$D$1];IF(ISNA([.$S36]);&quot;null&quot;;&quot;&quot;&quot;&quot;&amp;[.$S36]&amp;&quot;&quot;&quot;&quot;);[$JSON.$E$1];[.$U36];[$JSON.$F$1];IF(ISNA([.$V36]);&quot;null&quot;;&quot;&quot;&quot;&quot;&amp;[.$V36]&amp;&quot;&quot;&quot;&quot;);[$JSON.$G$1];[.$X36];[$JSON.$H$1];[.$H36];[$JSON.$I$1];[.J36];[$JSON.$J$1];[.$L36];[$JSON.$K$1];[.$O36];[$JSON.$L$1];[.$N36];[$JSON.$M$1];[.$R36];[$JSON.$N$1];[.$T36];[$JSON.$O$1];[.$W36];[$JSON.$P$1];[.$A36];[$JSON.$Q$1];[.$B36];[$JSON.$R$1])" office:value-type="string" office:string-value="{&quot;id&quot;:&quot;G-9&quot;,&quot;name&quot;:&quot;阿弥陀堂&quot;,&quot;kana&quot;:&quot;あみだどう&quot;,&quot;traitText&quot;:null,&quot;ruleText&quot;:&quot;自分のメインフェイズが開始したとき、自分の戦場のカード1つか、自分の魔力ゾーンのカード1つを指定して発動できる。そのカードを手札に戻す。&quot;,&quot;legacyText&quot;:null,&quot;imageUrl&quot;:&quot;https://one-draw.jp/ijinden/cardlist/G01/card/G_009.png&quot;,&quot;expansion&quot;:12,&quot;rarity&quot;:1,&quot;type&quot;:2,&quot;level&quot;:4,&quot;color&quot;:4,&quot;term&quot;:0,&quot;trait&quot;:0,&quot;legacy&quot;:0,&quot;orderTable&quot;:35,&quot;orderDeck&quot;:263}," calcext:value-type="string">
            <text:p>{"id":"G-9","name":"阿弥陀堂","kana":"あみだどう","traitText":null,"ruleText":"自分のメインフェイズが開始したとき、自分の戦場のカード1つか、自分の魔力ゾーンのカード1つを指定して発動できる。そのカードを手札に戻す。","legacyText":null,"imageUrl":"https://one-draw.jp/ijinden/cardlist/G01/card/G_009.png","expansion":12,"rarity":1,"type":2,"level":4,"color":4,"term":0,"trait":0,"legacy":0,"orderTable":35,"orderDeck":263},</text:p>
          </table:table-cell>
          <table:table-cell table:number-columns-repeated="16347"/>
        </table:table-row>
        <table:table-row table:style-name="ro2">
          <table:table-cell office:value-type="float" office:value="36" calcext:value-type="float">
            <text:p>36</text:p>
          </table:table-cell>
          <table:table-cell office:value-type="float" office:value="276" calcext:value-type="float">
            <text:p>276</text:p>
          </table:table-cell>
          <table:table-cell office:value-type="string" calcext:value-type="string">
            <text:p>G-10</text:p>
          </table:table-cell>
          <table:table-cell office:value-type="float" office:value="10" calcext:value-type="float">
            <text:p>10</text:p>
          </table:table-cell>
          <table:table-cell office:value-type="string" calcext:value-type="string">
            <text:p>毘盧遮那仏像</text:p>
          </table:table-cell>
          <table:table-cell office:value-type="string" calcext:value-type="string">
            <text:p>びるしゃなぶつぞう</text:p>
          </table:table-cell>
          <table:table-cell office:value-type="string" calcext:value-type="string">
            <text:p>日本の大天才デッキ</text:p>
          </table:table-cell>
          <table:table-cell table:formula="of:=VLOOKUP([.G37];[$収録番号.$A$1:$収録番号.$B$9];2;0)" office:value-type="float" office:value="12" calcext:value-type="float">
            <text:p>12</text:p>
          </table:table-cell>
          <table:table-cell office:value-type="string" calcext:value-type="string">
            <text:p>N</text:p>
          </table:table-cell>
          <table:table-cell table:formula="of:=VLOOKUP([.I37];[$レアリティ番号.$A$1:$レアリティ番号.$B$4];2;0)" office:value-type="float" office:value="1" calcext:value-type="float">
            <text:p>1</text:p>
          </table:table-cell>
          <table:table-cell office:value-type="string" calcext:value-type="string">
            <text:p>ハイケイ</text:p>
          </table:table-cell>
          <table:table-cell table:formula="of:=VLOOKUP([.K37];[$種類番号.$A$1:$種類番号.$B$4];2;0)" office:value-type="float" office:value="2" calcext:value-type="float">
            <text:p>2</text:p>
          </table:table-cell>
          <table:table-cell office:value-type="string" calcext:value-type="string">
            <text:p>緑</text:p>
          </table:table-cell>
          <table:table-cell table:formula="of:=VLOOKUP([.M37];[$色番号.$A$1:$色番号.$B$10];2;0)" office:value-type="float" office:value="4" calcext:value-type="float">
            <text:p>4</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7];[$特性番号.$A$1:$特性番号.$B$8];2;0);0)" office:value-type="float" office:value="0" calcext:value-type="float">
            <text:p>0</text:p>
          </table:table-cell>
          <table:table-cell office:value-type="string" calcext:value-type="string">
            <text:p>これが戦場にある間、自分の戦場のイジンは「パワー+1000」を得る。¶自分のエンドフェイズが開始したとき、自分の戦場のカードすべてを起こす。</text:p>
          </table:table-cell>
          <table:table-cell table:style-name="ce8" office:value-type="string" calcext:value-type="string">
            <text:p>魔力化</text:p>
          </table:table-cell>
          <table:table-cell table:formula="of:=IFERROR(VLOOKUP([.$V37];[$遺業能力番号.$A$1:$遺業能力番号.$B$9];2;0);0)" office:value-type="float" office:value="1" calcext:value-type="float">
            <text:p>1</text:p>
          </table:table-cell>
          <table:table-cell office:value-type="string" calcext:value-type="string">
            <text:p>https://one-draw.jp/ijinden/cardlist/G01/card/G_010.png</text:p>
          </table:table-cell>
          <table:table-cell table:formula="of:=CONCATENATE([$JSON.$A$1];[.$C37];[$JSON.$B$1];[.$E37];[$JSON.$C$1];[.$F37];[$JSON.$D$1];IF(ISNA([.$S37]);&quot;null&quot;;&quot;&quot;&quot;&quot;&amp;[.$S37]&amp;&quot;&quot;&quot;&quot;);[$JSON.$E$1];[.$U37];[$JSON.$F$1];IF(ISNA([.$V37]);&quot;null&quot;;&quot;&quot;&quot;&quot;&amp;[.$V37]&amp;&quot;&quot;&quot;&quot;);[$JSON.$G$1];[.$X37];[$JSON.$H$1];[.$H37];[$JSON.$I$1];[.J37];[$JSON.$J$1];[.$L37];[$JSON.$K$1];[.$O37];[$JSON.$L$1];[.$N37];[$JSON.$M$1];[.$R37];[$JSON.$N$1];[.$T37];[$JSON.$O$1];[.$W37];[$JSON.$P$1];[.$A37];[$JSON.$Q$1];[.$B37];[$JSON.$R$1])" office:value-type="string" office:string-value="{&quot;id&quot;:&quot;G-10&quot;,&quot;name&quot;:&quot;毘盧遮那仏像&quot;,&quot;kana&quot;:&quot;びるしゃなぶつぞう&quot;,&quot;traitText&quot;:null,&quot;ruleText&quot;:&quot;これが戦場にある間、自分の戦場のイジンは「パワー+1000」を得る。¶自分のエンドフェイズが開始したとき、自分の戦場のカードすべてを起こす。&quot;,&quot;legacyText&quot;:&quot;魔力化&quot;,&quot;imageUrl&quot;:&quot;https://one-draw.jp/ijinden/cardlist/G01/card/G_010.png&quot;,&quot;expansion&quot;:12,&quot;rarity&quot;:1,&quot;type&quot;:2,&quot;level&quot;:6,&quot;color&quot;:4,&quot;term&quot;:0,&quot;trait&quot;:0,&quot;legacy&quot;:1,&quot;orderTable&quot;:36,&quot;orderDeck&quot;:276}," calcext:value-type="string">
            <text:p>{"id":"G-10","name":"毘盧遮那仏像","kana":"びるしゃなぶつぞう","traitText":null,"ruleText":"これが戦場にある間、自分の戦場のイジンは「パワー+1000」を得る。¶自分のエンドフェイズが開始したとき、自分の戦場のカードすべてを起こす。","legacyText":"魔力化","imageUrl":"https://one-draw.jp/ijinden/cardlist/G01/card/G_010.png","expansion":12,"rarity":1,"type":2,"level":6,"color":4,"term":0,"trait":0,"legacy":1,"orderTable":36,"orderDeck":276},</text:p>
          </table:table-cell>
          <table:table-cell table:number-columns-repeated="16347"/>
        </table:table-row>
        <table:table-row table:style-name="ro2">
          <table:table-cell office:value-type="float" office:value="37" calcext:value-type="float">
            <text:p>37</text:p>
          </table:table-cell>
          <table:table-cell office:value-type="float" office:value="309" calcext:value-type="float">
            <text:p>309</text:p>
          </table:table-cell>
          <table:table-cell office:value-type="string" calcext:value-type="string">
            <text:p>G-11</text:p>
          </table:table-cell>
          <table:table-cell office:value-type="float" office:value="11" calcext:value-type="float">
            <text:p>11</text:p>
          </table:table-cell>
          <table:table-cell office:value-type="string" calcext:value-type="string">
            <text:p>グロウ</text:p>
          </table:table-cell>
          <table:table-cell office:value-type="string" calcext:value-type="string">
            <text:p>ぐろう</text:p>
          </table:table-cell>
          <table:table-cell office:value-type="string" calcext:value-type="string">
            <text:p>日本の大天才デッキ</text:p>
          </table:table-cell>
          <table:table-cell table:formula="of:=VLOOKUP([.G38];[$収録番号.$A$1:$収録番号.$B$9];2;0)" office:value-type="float" office:value="12" calcext:value-type="float">
            <text:p>12</text:p>
          </table:table-cell>
          <table:table-cell office:value-type="string" calcext:value-type="string">
            <text:p>N</text:p>
          </table:table-cell>
          <table:table-cell table:formula="of:=VLOOKUP([.I38];[$レアリティ番号.$A$1:$レアリティ番号.$B$4];2;0)" office:value-type="float" office:value="1" calcext:value-type="float">
            <text:p>1</text:p>
          </table:table-cell>
          <table:table-cell office:value-type="string" calcext:value-type="string">
            <text:p>マホウ</text:p>
          </table:table-cell>
          <table:table-cell table:formula="of:=VLOOKUP([.K38];[$種類番号.$A$1:$種類番号.$B$4];2;0)" office:value-type="float" office:value="3" calcext:value-type="float">
            <text:p>3</text:p>
          </table:table-cell>
          <table:table-cell office:value-type="string" calcext:value-type="string">
            <text:p>緑</text:p>
          </table:table-cell>
          <table:table-cell table:formula="of:=VLOOKUP([.M38];[$色番号.$A$1:$色番号.$B$10];2;0)"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Q3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8];[$特性番号.$A$1:$特性番号.$B$8];2;0);0)" office:value-type="float" office:value="0" calcext:value-type="float">
            <text:p>0</text:p>
          </table:table-cell>
          <table:table-cell office:value-type="string" calcext:value-type="string">
            <text:p>自分の山札の上から1枚を、裏のまま魔力ゾーンに置く。</text:p>
          </table:table-cell>
          <table:table-cell table:style-name="ce8" office:value-type="string" calcext:value-type="string">
            <text:p>冥府発動</text:p>
          </table:table-cell>
          <table:table-cell table:formula="of:=IFERROR(VLOOKUP([.$V38];[$遺業能力番号.$A$1:$遺業能力番号.$B$9];2;0);0)" office:value-type="float" office:value="2" calcext:value-type="float">
            <text:p>2</text:p>
          </table:table-cell>
          <table:table-cell office:value-type="string" calcext:value-type="string">
            <text:p>https://one-draw.jp/ijinden/cardlist/G01/card/G_011.png</text:p>
          </table:table-cell>
          <table:table-cell table:formula="of:=CONCATENATE([$JSON.$A$1];[.$C38];[$JSON.$B$1];[.$E38];[$JSON.$C$1];[.$F38];[$JSON.$D$1];IF(ISNA([.$S38]);&quot;null&quot;;&quot;&quot;&quot;&quot;&amp;[.$S38]&amp;&quot;&quot;&quot;&quot;);[$JSON.$E$1];[.$U38];[$JSON.$F$1];IF(ISNA([.$V38]);&quot;null&quot;;&quot;&quot;&quot;&quot;&amp;[.$V38]&amp;&quot;&quot;&quot;&quot;);[$JSON.$G$1];[.$X38];[$JSON.$H$1];[.$H38];[$JSON.$I$1];[.J38];[$JSON.$J$1];[.$L38];[$JSON.$K$1];[.$O38];[$JSON.$L$1];[.$N38];[$JSON.$M$1];[.$R38];[$JSON.$N$1];[.$T38];[$JSON.$O$1];[.$W38];[$JSON.$P$1];[.$A38];[$JSON.$Q$1];[.$B38];[$JSON.$R$1])" office:value-type="string" office:string-value="{&quot;id&quot;:&quot;G-11&quot;,&quot;name&quot;:&quot;グロウ&quot;,&quot;kana&quot;:&quot;ぐろう&quot;,&quot;traitText&quot;:null,&quot;ruleText&quot;:&quot;自分の山札の上から1枚を、裏のまま魔力ゾーンに置く。&quot;,&quot;legacyText&quot;:&quot;冥府発動&quot;,&quot;imageUrl&quot;:&quot;https://one-draw.jp/ijinden/cardlist/G01/card/G_011.png&quot;,&quot;expansion&quot;:12,&quot;rarity&quot;:1,&quot;type&quot;:3,&quot;level&quot;:3,&quot;color&quot;:4,&quot;term&quot;:0,&quot;trait&quot;:0,&quot;legacy&quot;:2,&quot;orderTable&quot;:37,&quot;orderDeck&quot;:309}," calcext:value-type="string">
            <text:p>{"id":"G-11","name":"グロウ","kana":"ぐろう","traitText":null,"ruleText":"自分の山札の上から1枚を、裏のまま魔力ゾーンに置く。","legacyText":"冥府発動","imageUrl":"https://one-draw.jp/ijinden/cardlist/G01/card/G_011.png","expansion":12,"rarity":1,"type":3,"level":3,"color":4,"term":0,"trait":0,"legacy":2,"orderTable":37,"orderDeck":309},</text:p>
          </table:table-cell>
          <table:table-cell table:number-columns-repeated="16347"/>
        </table:table-row>
        <table:table-row table:style-name="ro2">
          <table:table-cell office:value-type="float" office:value="38" calcext:value-type="float">
            <text:p>38</text:p>
          </table:table-cell>
          <table:table-cell office:value-type="float" office:value="328" calcext:value-type="float">
            <text:p>328</text:p>
          </table:table-cell>
          <table:table-cell office:value-type="string" calcext:value-type="string">
            <text:p>G-12</text:p>
          </table:table-cell>
          <table:table-cell office:value-type="float" office:value="12" calcext:value-type="float">
            <text:p>12</text:p>
          </table:table-cell>
          <table:table-cell office:value-type="string" calcext:value-type="string">
            <text:p>ギャザリング</text:p>
          </table:table-cell>
          <table:table-cell office:value-type="string" calcext:value-type="string">
            <text:p>ぎゃざりんぐ</text:p>
          </table:table-cell>
          <table:table-cell office:value-type="string" calcext:value-type="string">
            <text:p>日本の大天才デッキ</text:p>
          </table:table-cell>
          <table:table-cell table:formula="of:=VLOOKUP([.G39];[$収録番号.$A$1:$収録番号.$B$9];2;0)" office:value-type="float" office:value="12" calcext:value-type="float">
            <text:p>12</text:p>
          </table:table-cell>
          <table:table-cell office:value-type="string" calcext:value-type="string">
            <text:p>N</text:p>
          </table:table-cell>
          <table:table-cell table:formula="of:=VLOOKUP([.I39];[$レアリティ番号.$A$1:$レアリティ番号.$B$4];2;0)" office:value-type="float" office:value="1" calcext:value-type="float">
            <text:p>1</text:p>
          </table:table-cell>
          <table:table-cell office:value-type="string" calcext:value-type="string">
            <text:p>マホウ</text:p>
          </table:table-cell>
          <table:table-cell table:formula="of:=VLOOKUP([.K39];[$種類番号.$A$1:$種類番号.$B$4];2;0)" office:value-type="float" office:value="3" calcext:value-type="float">
            <text:p>3</text:p>
          </table:table-cell>
          <table:table-cell office:value-type="string" calcext:value-type="string">
            <text:p>緑</text:p>
          </table:table-cell>
          <table:table-cell table:formula="of:=VLOOKUP([.M39];[$色番号.$A$1:$色番号.$B$10];2;0)" office:value-type="float" office:value="4" calcext:value-type="float">
            <text:p>4</text:p>
          </table:table-cell>
          <table:table-cell office:value-type="float" office:value="5" calcext:value-type="float">
            <text:p>5</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3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9];[$特性番号.$A$1:$特性番号.$B$8];2;0);0)" office:value-type="float" office:value="0" calcext:value-type="float">
            <text:p>0</text:p>
          </table:table-cell>
          <table:table-cell office:value-type="string" calcext:value-type="string">
            <text:p>自分の戦場のガーディアンすべてを手札に戻す。自分の山札の上から2枚をガーディアンにして戦場に置く。</text:p>
          </table:table-cell>
          <table:table-cell table:style-name="ce8" office:value-type="string" calcext:value-type="string">
            <text:p>魔力化</text:p>
          </table:table-cell>
          <table:table-cell table:formula="of:=IFERROR(VLOOKUP([.$V39];[$遺業能力番号.$A$1:$遺業能力番号.$B$9];2;0);0)" office:value-type="float" office:value="1" calcext:value-type="float">
            <text:p>1</text:p>
          </table:table-cell>
          <table:table-cell office:value-type="string" calcext:value-type="string">
            <text:p>https://one-draw.jp/ijinden/cardlist/G01/card/G_012.png</text:p>
          </table:table-cell>
          <table:table-cell table:formula="of:=CONCATENATE([$JSON.$A$1];[.$C39];[$JSON.$B$1];[.$E39];[$JSON.$C$1];[.$F39];[$JSON.$D$1];IF(ISNA([.$S39]);&quot;null&quot;;&quot;&quot;&quot;&quot;&amp;[.$S39]&amp;&quot;&quot;&quot;&quot;);[$JSON.$E$1];[.$U39];[$JSON.$F$1];IF(ISNA([.$V39]);&quot;null&quot;;&quot;&quot;&quot;&quot;&amp;[.$V39]&amp;&quot;&quot;&quot;&quot;);[$JSON.$G$1];[.$X39];[$JSON.$H$1];[.$H39];[$JSON.$I$1];[.J39];[$JSON.$J$1];[.$L39];[$JSON.$K$1];[.$O39];[$JSON.$L$1];[.$N39];[$JSON.$M$1];[.$R39];[$JSON.$N$1];[.$T39];[$JSON.$O$1];[.$W39];[$JSON.$P$1];[.$A39];[$JSON.$Q$1];[.$B39];[$JSON.$R$1])" office:value-type="string" office:string-value="{&quot;id&quot;:&quot;G-12&quot;,&quot;name&quot;:&quot;ギャザリング&quot;,&quot;kana&quot;:&quot;ぎゃざりんぐ&quot;,&quot;traitText&quot;:null,&quot;ruleText&quot;:&quot;自分の戦場のガーディアンすべてを手札に戻す。自分の山札の上から2枚をガーディアンにして戦場に置く。&quot;,&quot;legacyText&quot;:&quot;魔力化&quot;,&quot;imageUrl&quot;:&quot;https://one-draw.jp/ijinden/cardlist/G01/card/G_012.png&quot;,&quot;expansion&quot;:12,&quot;rarity&quot;:1,&quot;type&quot;:3,&quot;level&quot;:5,&quot;color&quot;:4,&quot;term&quot;:0,&quot;trait&quot;:0,&quot;legacy&quot;:1,&quot;orderTable&quot;:38,&quot;orderDeck&quot;:328}," calcext:value-type="string">
            <text:p>{"id":"G-12","name":"ギャザリング","kana":"ぎゃざりんぐ","traitText":null,"ruleText":"自分の戦場のガーディアンすべてを手札に戻す。自分の山札の上から2枚をガーディアンにして戦場に置く。","legacyText":"魔力化","imageUrl":"https://one-draw.jp/ijinden/cardlist/G01/card/G_012.png","expansion":12,"rarity":1,"type":3,"level":5,"color":4,"term":0,"trait":0,"legacy":1,"orderTable":38,"orderDeck":328},</text:p>
          </table:table-cell>
          <table:table-cell table:number-columns-repeated="16347"/>
        </table:table-row>
        <table:table-row table:style-name="ro2">
          <table:table-cell office:value-type="float" office:value="39" calcext:value-type="float">
            <text:p>39</text:p>
          </table:table-cell>
          <table:table-cell office:value-type="float" office:value="355" calcext:value-type="float">
            <text:p>355</text:p>
          </table:table-cell>
          <table:table-cell office:value-type="string" calcext:value-type="string">
            <text:p>G-13</text:p>
          </table:table-cell>
          <table:table-cell office:value-type="float" office:value="13" calcext:value-type="float">
            <text:p>13</text:p>
          </table:table-cell>
          <table:table-cell office:value-type="string" calcext:value-type="string">
            <text:p>グリーンストーン</text:p>
          </table:table-cell>
          <table:table-cell office:value-type="string" calcext:value-type="string">
            <text:p>ぐりーんすとーん</text:p>
          </table:table-cell>
          <table:table-cell office:value-type="string" calcext:value-type="string">
            <text:p>日本の大天才デッキ</text:p>
          </table:table-cell>
          <table:table-cell table:formula="of:=VLOOKUP([.G40];[$収録番号.$A$1:$収録番号.$B$9];2;0)" office:value-type="float" office:value="12" calcext:value-type="float">
            <text:p>12</text:p>
          </table:table-cell>
          <table:table-cell office:value-type="string" calcext:value-type="string">
            <text:p>N</text:p>
          </table:table-cell>
          <table:table-cell table:formula="of:=VLOOKUP([.I40];[$レアリティ番号.$A$1:$レアリティ番号.$B$4];2;0)" office:value-type="float" office:value="1" calcext:value-type="float">
            <text:p>1</text:p>
          </table:table-cell>
          <table:table-cell office:value-type="string" calcext:value-type="string">
            <text:p>マリョク</text:p>
          </table:table-cell>
          <table:table-cell table:formula="of:=VLOOKUP([.K40];[$種類番号.$A$1:$種類番号.$B$4];2;0)" office:value-type="float" office:value="4" calcext:value-type="float">
            <text:p>4</text:p>
          </table:table-cell>
          <table:table-cell office:value-type="string" calcext:value-type="string">
            <text:p>緑</text:p>
          </table:table-cell>
          <table:table-cell table:formula="of:=VLOOKUP([.M40];[$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4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40];[$特性番号.$A$1:$特性番号.$B$8];2;0);0)" office:value-type="float" office:value="0" calcext:value-type="float">
            <text:p>0</text:p>
          </table:table-cell>
          <table:table-cell office:value-type="string" calcext:value-type="string">
            <text:p>※デッキに何枚でも入れてよい。</text:p>
          </table:table-cell>
          <table:table-cell table:style-name="ce8" office:value-type="string" calcext:value-type="string">
            <text:p>復元</text:p>
          </table:table-cell>
          <table:table-cell table:formula="of:=IFERROR(VLOOKUP([.$V40];[$遺業能力番号.$A$1:$遺業能力番号.$B$9];2;0);0)" office:value-type="float" office:value="3" calcext:value-type="float">
            <text:p>3</text:p>
          </table:table-cell>
          <table:table-cell office:value-type="string" calcext:value-type="string">
            <text:p>https://one-draw.jp/ijinden/cardlist/G01/card/G_013.png</text:p>
          </table:table-cell>
          <table:table-cell table:formula="of:=CONCATENATE([$JSON.$A$1];[.$C40];[$JSON.$B$1];[.$E40];[$JSON.$C$1];[.$F40];[$JSON.$D$1];IF(ISNA([.$S40]);&quot;null&quot;;&quot;&quot;&quot;&quot;&amp;[.$S40]&amp;&quot;&quot;&quot;&quot;);[$JSON.$E$1];[.$U40];[$JSON.$F$1];IF(ISNA([.$V40]);&quot;null&quot;;&quot;&quot;&quot;&quot;&amp;[.$V40]&amp;&quot;&quot;&quot;&quot;);[$JSON.$G$1];[.$X40];[$JSON.$H$1];[.$H40];[$JSON.$I$1];[.J40];[$JSON.$J$1];[.$L40];[$JSON.$K$1];[.$O40];[$JSON.$L$1];[.$N40];[$JSON.$M$1];[.$R40];[$JSON.$N$1];[.$T40];[$JSON.$O$1];[.$W40];[$JSON.$P$1];[.$A40];[$JSON.$Q$1];[.$B40];[$JSON.$R$1])" office:value-type="string" office:string-value="{&quot;id&quot;:&quot;G-13&quot;,&quot;name&quot;:&quot;グリーンストーン&quot;,&quot;kana&quot;:&quot;ぐりーんすとーん&quot;,&quot;traitText&quot;:null,&quot;ruleText&quot;:&quot;※デッキに何枚でも入れてよい。&quot;,&quot;legacyText&quot;:&quot;復元&quot;,&quot;imageUrl&quot;:&quot;https://one-draw.jp/ijinden/cardlist/G01/card/G_013.png&quot;,&quot;expansion&quot;:12,&quot;rarity&quot;:1,&quot;type&quot;:4,&quot;level&quot;:1,&quot;color&quot;:4,&quot;term&quot;:0,&quot;trait&quot;:0,&quot;legacy&quot;:3,&quot;orderTable&quot;:39,&quot;orderDeck&quot;:355}," calcext:value-type="string">
            <text:p>{"id":"G-13","name":"グリーンストーン","kana":"ぐりーんすとーん","traitText":null,"ruleText":"※デッキに何枚でも入れてよい。","legacyText":"復元","imageUrl":"https://one-draw.jp/ijinden/cardlist/G01/card/G_013.png","expansion":12,"rarity":1,"type":4,"level":1,"color":4,"term":0,"trait":0,"legacy":3,"orderTable":39,"orderDeck":355},</text:p>
          </table:table-cell>
          <table:table-cell table:number-columns-repeated="16347"/>
        </table:table-row>
        <table:table-row table:style-name="ro2">
          <table:table-cell office:value-type="float" office:value="40" calcext:value-type="float">
            <text:p>40</text:p>
          </table:table-cell>
          <table:table-cell office:value-type="float" office:value="107" calcext:value-type="float">
            <text:p>107</text:p>
          </table:table-cell>
          <table:table-cell office:value-type="string" calcext:value-type="string">
            <text:p>1-1</text:p>
          </table:table-cell>
          <table:table-cell office:value-type="float" office:value="1" calcext:value-type="float">
            <text:p>1</text:p>
          </table:table-cell>
          <table:table-cell office:value-type="string" calcext:value-type="string">
            <text:p>織田信長</text:p>
          </table:table-cell>
          <table:table-cell office:value-type="string" calcext:value-type="string">
            <text:p>おだのぶなが</text:p>
          </table:table-cell>
          <table:table-cell office:value-type="string" calcext:value-type="string">
            <text:p>第１弾ブースターパック</text:p>
          </table:table-cell>
          <table:table-cell table:formula="of:=VLOOKUP([.G41];[$収録番号.$A$1:$収録番号.$B$9];2;0)" office:value-type="float" office:value="15" calcext:value-type="float">
            <text:p>15</text:p>
          </table:table-cell>
          <table:table-cell office:value-type="string" calcext:value-type="string">
            <text:p>SR</text:p>
          </table:table-cell>
          <table:table-cell table:formula="of:=VLOOKUP([.I41];[$レアリティ番号.$A$1:$レアリティ番号.$B$4];2;0)" office:value-type="float" office:value="4" calcext:value-type="float">
            <text:p>4</text:p>
          </table:table-cell>
          <table:table-cell office:value-type="string" calcext:value-type="string">
            <text:p>イジン</text:p>
          </table:table-cell>
          <table:table-cell table:formula="of:=VLOOKUP([.K41];[$種類番号.$A$1:$種類番号.$B$4];2;0)" office:value-type="float" office:value="1" calcext:value-type="float">
            <text:p>1</text:p>
          </table:table-cell>
          <table:table-cell office:value-type="string" calcext:value-type="string">
            <text:p>赤</text:p>
          </table:table-cell>
          <table:table-cell table:formula="of:=VLOOKUP([.M41];[$色番号.$A$1:$色番号.$B$5];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4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41];[$特性番号.$A$1:$特性番号.$B$8];2;0);0)" office:value-type="float" office:value="0" calcext:value-type="float">
            <text:p>0</text:p>
          </table:table-cell>
          <table:table-cell office:value-type="string" calcext:value-type="string">
            <text:p>即応 ダブルプレッシャー¶相手の戦場のガーディアンが1体以下の間「ダブルプレッシャー」を失い、「特性：剣術」を得る。¶自分のエンドフェイズが開始したとき、これが寝ているなら発動する。これを破壊する。</text:p>
          </table:table-cell>
          <table:table-cell table:style-name="ce8" table:formula="of:=NA()" office:value-type="string" office:string-value="" calcext:value-type="error">
            <text:p>#N/A</text:p>
          </table:table-cell>
          <table:table-cell table:formula="of:=IFERROR(VLOOKUP([.$V41];[$遺業能力番号.$A$1:$遺業能力番号.$B$9];2;0);0)" office:value-type="float" office:value="0" calcext:value-type="float">
            <text:p>0</text:p>
          </table:table-cell>
          <table:table-cell office:value-type="string" calcext:value-type="string">
            <text:p>https://one-draw.jp/ijinden/cardlist/001/card/01_001.png</text:p>
          </table:table-cell>
          <table:table-cell table:formula="of:=CONCATENATE([$JSON.$A$1];[.$C41];[$JSON.$B$1];[.$E41];[$JSON.$C$1];[.$F41];[$JSON.$D$1];IF(ISNA([.$S41]);&quot;null&quot;;&quot;&quot;&quot;&quot;&amp;[.$S41]&amp;&quot;&quot;&quot;&quot;);[$JSON.$E$1];[.$U41];[$JSON.$F$1];IF(ISNA([.$V41]);&quot;null&quot;;&quot;&quot;&quot;&quot;&amp;[.$V41]&amp;&quot;&quot;&quot;&quot;);[$JSON.$G$1];[.$X41];[$JSON.$H$1];[.$H41];[$JSON.$I$1];[.J41];[$JSON.$J$1];[.$L41];[$JSON.$K$1];[.$O41];[$JSON.$L$1];[.$N41];[$JSON.$M$1];[.$R41];[$JSON.$N$1];[.$T41];[$JSON.$O$1];[.$W41];[$JSON.$P$1];[.$A41];[$JSON.$Q$1];[.$B41];[$JSON.$R$1])" office:value-type="string" office:string-value="{&quot;id&quot;:&quot;1-1&quot;,&quot;name&quot;:&quot;織田信長&quot;,&quot;kana&quot;:&quot;おだのぶなが&quot;,&quot;traitText&quot;:null,&quot;ruleText&quot;:&quot;即応 ダブルプレッシャー¶相手の戦場のガーディアンが1体以下の間「ダブルプレッシャー」を失い、「特性：剣術」を得る。¶自分のエンドフェイズが開始したとき、これが寝ているなら発動する。これを破壊する。&quot;,&quot;legacyText&quot;:null,&quot;imageUrl&quot;:&quot;https://one-draw.jp/ijinden/cardlist/001/card/01_001.png&quot;,&quot;expansion&quot;:15,&quot;rarity&quot;:4,&quot;type&quot;:1,&quot;level&quot;:4,&quot;color&quot;:1,&quot;term&quot;:0,&quot;trait&quot;:0,&quot;legacy&quot;:0,&quot;orderTable&quot;:40,&quot;orderDeck&quot;:107}," calcext:value-type="string">
            <text:p>{"id":"1-1","name":"織田信長","kana":"おだのぶなが","traitText":null,"ruleText":"即応 ダブルプレッシャー¶相手の戦場のガーディアンが1体以下の間「ダブルプレッシャー」を失い、「特性：剣術」を得る。¶自分のエンドフェイズが開始したとき、これが寝ているなら発動する。これを破壊する。","legacyText":null,"imageUrl":"https://one-draw.jp/ijinden/cardlist/001/card/01_001.png","expansion":15,"rarity":4,"type":1,"level":4,"color":1,"term":0,"trait":0,"legacy":0,"orderTable":40,"orderDeck":107},</text:p>
          </table:table-cell>
          <table:table-cell table:number-columns-repeated="16347"/>
        </table:table-row>
        <table:table-row table:style-name="ro2">
          <table:table-cell office:value-type="float" office:value="41" calcext:value-type="float">
            <text:p>41</text:p>
          </table:table-cell>
          <table:table-cell office:value-type="float" office:value="145" calcext:value-type="float">
            <text:p>145</text:p>
          </table:table-cell>
          <table:table-cell office:value-type="string" calcext:value-type="string">
            <text:p>1-2</text:p>
          </table:table-cell>
          <table:table-cell office:value-type="float" office:value="2" calcext:value-type="float">
            <text:p>2</text:p>
          </table:table-cell>
          <table:table-cell office:value-type="string" calcext:value-type="string">
            <text:p>クレオパトラ</text:p>
          </table:table-cell>
          <table:table-cell office:value-type="string" calcext:value-type="string">
            <text:p>くれおぱとら</text:p>
          </table:table-cell>
          <table:table-cell office:value-type="string" calcext:value-type="string">
            <text:p>第１弾ブースターパック</text:p>
          </table:table-cell>
          <table:table-cell table:formula="of:=VLOOKUP([.G42];[$収録番号.$A$1:$収録番号.$B$9];2;0)" office:value-type="float" office:value="15" calcext:value-type="float">
            <text:p>15</text:p>
          </table:table-cell>
          <table:table-cell office:value-type="string" calcext:value-type="string">
            <text:p>SR</text:p>
          </table:table-cell>
          <table:table-cell table:formula="of:=VLOOKUP([.I42];[$レアリティ番号.$A$1:$レアリティ番号.$B$4];2;0)" office:value-type="float" office:value="4" calcext:value-type="float">
            <text:p>4</text:p>
          </table:table-cell>
          <table:table-cell office:value-type="string" calcext:value-type="string">
            <text:p>イジン</text:p>
          </table:table-cell>
          <table:table-cell table:formula="of:=VLOOKUP([.K42];[$種類番号.$A$1:$種類番号.$B$4];2;0)" office:value-type="float" office:value="1" calcext:value-type="float">
            <text:p>1</text:p>
          </table:table-cell>
          <table:table-cell office:value-type="string" calcext:value-type="string">
            <text:p>赤</text:p>
          </table:table-cell>
          <table:table-cell table:formula="of:=VLOOKUP([.M42];[$色番号.$A$1:$色番号.$B$5];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4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42];[$特性番号.$A$1:$特性番号.$B$8];2;0);0)" office:value-type="float" office:value="0" calcext:value-type="float">
            <text:p>0</text:p>
          </table:table-cell>
          <table:table-cell office:value-type="string" calcext:value-type="string">
            <text:p>戦場に置かれたときに発動できる。戦場のハイケイすべてを破壊する。¶ハイケイが破壊されるたび、1ドローする。</text:p>
          </table:table-cell>
          <table:table-cell table:style-name="ce8" office:value-type="string" calcext:value-type="string">
            <text:p>1ドローする</text:p>
          </table:table-cell>
          <table:table-cell table:formula="of:=IFERROR(VLOOKUP([.$V42];[$遺業能力番号.$A$1:$遺業能力番号.$B$9];2;0);0)" office:value-type="float" office:value="4" calcext:value-type="float">
            <text:p>4</text:p>
          </table:table-cell>
          <table:table-cell office:value-type="string" calcext:value-type="string">
            <text:p>https://one-draw.jp/ijinden/cardlist/001/card/01_002.png</text:p>
          </table:table-cell>
          <table:table-cell table:formula="of:=CONCATENATE([$JSON.$A$1];[.$C42];[$JSON.$B$1];[.$E42];[$JSON.$C$1];[.$F42];[$JSON.$D$1];IF(ISNA([.$S42]);&quot;null&quot;;&quot;&quot;&quot;&quot;&amp;[.$S42]&amp;&quot;&quot;&quot;&quot;);[$JSON.$E$1];[.$U42];[$JSON.$F$1];IF(ISNA([.$V42]);&quot;null&quot;;&quot;&quot;&quot;&quot;&amp;[.$V42]&amp;&quot;&quot;&quot;&quot;);[$JSON.$G$1];[.$X42];[$JSON.$H$1];[.$H42];[$JSON.$I$1];[.J42];[$JSON.$J$1];[.$L42];[$JSON.$K$1];[.$O42];[$JSON.$L$1];[.$N42];[$JSON.$M$1];[.$R42];[$JSON.$N$1];[.$T42];[$JSON.$O$1];[.$W42];[$JSON.$P$1];[.$A42];[$JSON.$Q$1];[.$B42];[$JSON.$R$1])" office:value-type="string" office:string-value="{&quot;id&quot;:&quot;1-2&quot;,&quot;name&quot;:&quot;クレオパトラ&quot;,&quot;kana&quot;:&quot;くれおぱとら&quot;,&quot;traitText&quot;:null,&quot;ruleText&quot;:&quot;戦場に置かれたときに発動できる。戦場のハイケイすべてを破壊する。¶ハイケイが破壊されるたび、1ドローする。&quot;,&quot;legacyText&quot;:&quot;1ドローする&quot;,&quot;imageUrl&quot;:&quot;https://one-draw.jp/ijinden/cardlist/001/card/01_002.png&quot;,&quot;expansion&quot;:15,&quot;rarity&quot;:4,&quot;type&quot;:1,&quot;level&quot;:5,&quot;color&quot;:1,&quot;term&quot;:0,&quot;trait&quot;:0,&quot;legacy&quot;:4,&quot;orderTable&quot;:41,&quot;orderDeck&quot;:145}," calcext:value-type="string">
            <text:p>{"id":"1-2","name":"クレオパトラ","kana":"くれおぱとら","traitText":null,"ruleText":"戦場に置かれたときに発動できる。戦場のハイケイすべてを破壊する。¶ハイケイが破壊されるたび、1ドローする。","legacyText":"1ドローする","imageUrl":"https://one-draw.jp/ijinden/cardlist/001/card/01_002.png","expansion":15,"rarity":4,"type":1,"level":5,"color":1,"term":0,"trait":0,"legacy":4,"orderTable":41,"orderDeck":145},</text:p>
          </table:table-cell>
          <table:table-cell table:number-columns-repeated="16347"/>
        </table:table-row>
        <table:table-row table:style-name="ro2">
          <table:table-cell office:value-type="float" office:value="42" calcext:value-type="float">
            <text:p>42</text:p>
          </table:table-cell>
          <table:table-cell office:value-type="float" office:value="77" calcext:value-type="float">
            <text:p>77</text:p>
          </table:table-cell>
          <table:table-cell office:value-type="string" calcext:value-type="string">
            <text:p>1-3</text:p>
          </table:table-cell>
          <table:table-cell office:value-type="float" office:value="3" calcext:value-type="float">
            <text:p>3</text:p>
          </table:table-cell>
          <table:table-cell office:value-type="string" calcext:value-type="string">
            <text:p>マルティン・ルター</text:p>
          </table:table-cell>
          <table:table-cell office:value-type="string" calcext:value-type="string">
            <text:p>まるてぃんるたー</text:p>
          </table:table-cell>
          <table:table-cell office:value-type="string" calcext:value-type="string">
            <text:p>第１弾ブースターパック</text:p>
          </table:table-cell>
          <table:table-cell table:formula="of:=VLOOKUP([.G43];[$収録番号.$A$1:$収録番号.$B$9];2;0)" office:value-type="float" office:value="15" calcext:value-type="float">
            <text:p>15</text:p>
          </table:table-cell>
          <table:table-cell office:value-type="string" calcext:value-type="string">
            <text:p>SR</text:p>
          </table:table-cell>
          <table:table-cell table:formula="of:=VLOOKUP([.I43];[$レアリティ番号.$A$1:$レアリティ番号.$B$4];2;0)" office:value-type="float" office:value="4" calcext:value-type="float">
            <text:p>4</text:p>
          </table:table-cell>
          <table:table-cell office:value-type="string" calcext:value-type="string">
            <text:p>イジン</text:p>
          </table:table-cell>
          <table:table-cell table:formula="of:=VLOOKUP([.K43];[$種類番号.$A$1:$種類番号.$B$4];2;0)" office:value-type="float" office:value="1" calcext:value-type="float">
            <text:p>1</text:p>
          </table:table-cell>
          <table:table-cell office:value-type="string" calcext:value-type="string">
            <text:p>青</text:p>
          </table:table-cell>
          <table:table-cell table:formula="of:=VLOOKUP([.M43];[$色番号.$A$1:$色番号.$B$5];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4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43];[$特性番号.$A$1:$特性番号.$B$8];2;0);0)" office:value-type="float" office:value="0" calcext:value-type="float">
            <text:p>0</text:p>
          </table:table-cell>
          <table:table-cell office:value-type="string" calcext:value-type="string">
            <text:p>相手はマホウ使用に際し、魔力ゾーンの裏のカードを墓地に置くことができない。¶相手のターンの間「パワー+3000」を得る。</text:p>
          </table:table-cell>
          <table:table-cell table:style-name="ce8" office:value-type="string" calcext:value-type="string">
            <text:p>1ドローする</text:p>
          </table:table-cell>
          <table:table-cell table:formula="of:=IFERROR(VLOOKUP([.$V43];[$遺業能力番号.$A$1:$遺業能力番号.$B$9];2;0);0)" office:value-type="float" office:value="4" calcext:value-type="float">
            <text:p>4</text:p>
          </table:table-cell>
          <table:table-cell office:value-type="string" calcext:value-type="string">
            <text:p>https://one-draw.jp/ijinden/cardlist/001/card/01_003.png</text:p>
          </table:table-cell>
          <table:table-cell table:formula="of:=CONCATENATE([$JSON.$A$1];[.$C43];[$JSON.$B$1];[.$E43];[$JSON.$C$1];[.$F43];[$JSON.$D$1];IF(ISNA([.$S43]);&quot;null&quot;;&quot;&quot;&quot;&quot;&amp;[.$S43]&amp;&quot;&quot;&quot;&quot;);[$JSON.$E$1];[.$U43];[$JSON.$F$1];IF(ISNA([.$V43]);&quot;null&quot;;&quot;&quot;&quot;&quot;&amp;[.$V43]&amp;&quot;&quot;&quot;&quot;);[$JSON.$G$1];[.$X43];[$JSON.$H$1];[.$H43];[$JSON.$I$1];[.J43];[$JSON.$J$1];[.$L43];[$JSON.$K$1];[.$O43];[$JSON.$L$1];[.$N43];[$JSON.$M$1];[.$R43];[$JSON.$N$1];[.$T43];[$JSON.$O$1];[.$W43];[$JSON.$P$1];[.$A43];[$JSON.$Q$1];[.$B43];[$JSON.$R$1])" office:value-type="string" office:string-value="{&quot;id&quot;:&quot;1-3&quot;,&quot;name&quot;:&quot;マルティン・ルター&quot;,&quot;kana&quot;:&quot;まるてぃんるたー&quot;,&quot;traitText&quot;:null,&quot;ruleText&quot;:&quot;相手はマホウ使用に際し、魔力ゾーンの裏のカードを墓地に置くことができない。¶相手のターンの間「パワー+3000」を得る。&quot;,&quot;legacyText&quot;:&quot;1ドローする&quot;,&quot;imageUrl&quot;:&quot;https://one-draw.jp/ijinden/cardlist/001/card/01_003.png&quot;,&quot;expansion&quot;:15,&quot;rarity&quot;:4,&quot;type&quot;:1,&quot;level&quot;:3,&quot;color&quot;:2,&quot;term&quot;:0,&quot;trait&quot;:0,&quot;legacy&quot;:4,&quot;orderTable&quot;:42,&quot;orderDeck&quot;:77}," calcext:value-type="string">
            <text:p>{"id":"1-3","name":"マルティン・ルター","kana":"まるてぃんるたー","traitText":null,"ruleText":"相手はマホウ使用に際し、魔力ゾーンの裏のカードを墓地に置くことができない。¶相手のターンの間「パワー+3000」を得る。","legacyText":"1ドローする","imageUrl":"https://one-draw.jp/ijinden/cardlist/001/card/01_003.png","expansion":15,"rarity":4,"type":1,"level":3,"color":2,"term":0,"trait":0,"legacy":4,"orderTable":42,"orderDeck":77},</text:p>
          </table:table-cell>
          <table:table-cell table:number-columns-repeated="16347"/>
        </table:table-row>
        <table:table-row table:style-name="ro2">
          <table:table-cell office:value-type="float" office:value="43" calcext:value-type="float">
            <text:p>43</text:p>
          </table:table-cell>
          <table:table-cell office:value-type="float" office:value="187" calcext:value-type="float">
            <text:p>187</text:p>
          </table:table-cell>
          <table:table-cell office:value-type="string" calcext:value-type="string">
            <text:p>1-4</text:p>
          </table:table-cell>
          <table:table-cell office:value-type="float" office:value="4" calcext:value-type="float">
            <text:p>4</text:p>
          </table:table-cell>
          <table:table-cell office:value-type="string" calcext:value-type="string">
            <text:p>クリストファー・コロンブス</text:p>
          </table:table-cell>
          <table:table-cell office:value-type="string" calcext:value-type="string">
            <text:p>くりすとふぁーころんぶす</text:p>
          </table:table-cell>
          <table:table-cell office:value-type="string" calcext:value-type="string">
            <text:p>第１弾ブースターパック</text:p>
          </table:table-cell>
          <table:table-cell table:formula="of:=VLOOKUP([.G44];[$収録番号.$A$1:$収録番号.$B$9];2;0)" office:value-type="float" office:value="15" calcext:value-type="float">
            <text:p>15</text:p>
          </table:table-cell>
          <table:table-cell office:value-type="string" calcext:value-type="string">
            <text:p>SR</text:p>
          </table:table-cell>
          <table:table-cell table:formula="of:=VLOOKUP([.I44];[$レアリティ番号.$A$1:$レアリティ番号.$B$4];2;0)" office:value-type="float" office:value="4" calcext:value-type="float">
            <text:p>4</text:p>
          </table:table-cell>
          <table:table-cell office:value-type="string" calcext:value-type="string">
            <text:p>イジン</text:p>
          </table:table-cell>
          <table:table-cell table:formula="of:=VLOOKUP([.K44];[$種類番号.$A$1:$種類番号.$B$4];2;0)" office:value-type="float" office:value="1" calcext:value-type="float">
            <text:p>1</text:p>
          </table:table-cell>
          <table:table-cell office:value-type="string" calcext:value-type="string">
            <text:p>青</text:p>
          </table:table-cell>
          <table:table-cell table:formula="of:=VLOOKUP([.M44];[$色番号.$A$1:$色番号.$B$5];2;0)" office:value-type="float" office:value="2" calcext:value-type="float">
            <text:p>2</text:p>
          </table:table-cell>
          <table:table-cell office:value-type="float" office:value="6" calcext:value-type="float">
            <text:p>6</text:p>
          </table:table-cell>
          <table:table-cell table:formula="of:=NA()" office:value-type="string" office:string-value="" calcext:value-type="error">
            <text:p>#N/A</text:p>
          </table:table-cell>
          <table:table-cell office:value-type="string" calcext:value-type="string">
            <text:p>航海</text:p>
          </table:table-cell>
          <table:table-cell table:formula="of:=IFERROR(VLOOKUP([.$Q44];[$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44];[$特性番号.$A$1:$特性番号.$B$8];2;0);0)" office:value-type="float" office:value="0" calcext:value-type="float">
            <text:p>0</text:p>
          </table:table-cell>
          <table:table-cell office:value-type="string" calcext:value-type="string">
            <text:p>ダブルプレッシャー¶イジンからブロックされない。¶航海 - アタッカーになったとき、イジン召喚権+1する。</text:p>
          </table:table-cell>
          <table:table-cell table:style-name="ce8" table:formula="of:=NA()" office:value-type="string" office:string-value="" calcext:value-type="error">
            <text:p>#N/A</text:p>
          </table:table-cell>
          <table:table-cell table:formula="of:=IFERROR(VLOOKUP([.$V44];[$遺業能力番号.$A$1:$遺業能力番号.$B$9];2;0);0)" office:value-type="float" office:value="0" calcext:value-type="float">
            <text:p>0</text:p>
          </table:table-cell>
          <table:table-cell office:value-type="string" calcext:value-type="string">
            <text:p>https://one-draw.jp/ijinden/cardlist/001/card/01_004.png</text:p>
          </table:table-cell>
          <table:table-cell table:formula="of:=CONCATENATE([$JSON.$A$1];[.$C44];[$JSON.$B$1];[.$E44];[$JSON.$C$1];[.$F44];[$JSON.$D$1];IF(ISNA([.$S44]);&quot;null&quot;;&quot;&quot;&quot;&quot;&amp;[.$S44]&amp;&quot;&quot;&quot;&quot;);[$JSON.$E$1];[.$U44];[$JSON.$F$1];IF(ISNA([.$V44]);&quot;null&quot;;&quot;&quot;&quot;&quot;&amp;[.$V44]&amp;&quot;&quot;&quot;&quot;);[$JSON.$G$1];[.$X44];[$JSON.$H$1];[.$H44];[$JSON.$I$1];[.J44];[$JSON.$J$1];[.$L44];[$JSON.$K$1];[.$O44];[$JSON.$L$1];[.$N44];[$JSON.$M$1];[.$R44];[$JSON.$N$1];[.$T44];[$JSON.$O$1];[.$W44];[$JSON.$P$1];[.$A44];[$JSON.$Q$1];[.$B44];[$JSON.$R$1])" office:value-type="string" office:string-value="{&quot;id&quot;:&quot;1-4&quot;,&quot;name&quot;:&quot;クリストファー・コロンブス&quot;,&quot;kana&quot;:&quot;くりすとふぁーころんぶす&quot;,&quot;traitText&quot;:null,&quot;ruleText&quot;:&quot;ダブルプレッシャー¶イジンからブロックされない。¶航海 - アタッカーになったとき、イジン召喚権+1する。&quot;,&quot;legacyText&quot;:null,&quot;imageUrl&quot;:&quot;https://one-draw.jp/ijinden/cardlist/001/card/01_004.png&quot;,&quot;expansion&quot;:15,&quot;rarity&quot;:4,&quot;type&quot;:1,&quot;level&quot;:6,&quot;color&quot;:2,&quot;term&quot;:1,&quot;trait&quot;:0,&quot;legacy&quot;:0,&quot;orderTable&quot;:43,&quot;orderDeck&quot;:187}," calcext:value-type="string">
            <text:p>{"id":"1-4","name":"クリストファー・コロンブス","kana":"くりすとふぁーころんぶす","traitText":null,"ruleText":"ダブルプレッシャー¶イジンからブロックされない。¶航海 - アタッカーになったとき、イジン召喚権+1する。","legacyText":null,"imageUrl":"https://one-draw.jp/ijinden/cardlist/001/card/01_004.png","expansion":15,"rarity":4,"type":1,"level":6,"color":2,"term":1,"trait":0,"legacy":0,"orderTable":43,"orderDeck":187},</text:p>
          </table:table-cell>
          <table:table-cell table:number-columns-repeated="16347"/>
        </table:table-row>
        <table:table-row table:style-name="ro2">
          <table:table-cell office:value-type="float" office:value="44" calcext:value-type="float">
            <text:p>44</text:p>
          </table:table-cell>
          <table:table-cell office:value-type="float" office:value="208" calcext:value-type="float">
            <text:p>208</text:p>
          </table:table-cell>
          <table:table-cell office:value-type="string" calcext:value-type="string">
            <text:p>1-5</text:p>
          </table:table-cell>
          <table:table-cell office:value-type="float" office:value="5" calcext:value-type="float">
            <text:p>5</text:p>
          </table:table-cell>
          <table:table-cell office:value-type="string" calcext:value-type="string">
            <text:p>ヴォルフガング・アマデウス・モーツァルト</text:p>
          </table:table-cell>
          <table:table-cell office:value-type="string" calcext:value-type="string">
            <text:p>ゔぉるふがんぐあまでうすもーつぁると</text:p>
          </table:table-cell>
          <table:table-cell office:value-type="string" calcext:value-type="string">
            <text:p>第１弾ブースターパック</text:p>
          </table:table-cell>
          <table:table-cell table:formula="of:=VLOOKUP([.G45];[$収録番号.$A$1:$収録番号.$B$9];2;0)" office:value-type="float" office:value="15" calcext:value-type="float">
            <text:p>15</text:p>
          </table:table-cell>
          <table:table-cell office:value-type="string" calcext:value-type="string">
            <text:p>SR</text:p>
          </table:table-cell>
          <table:table-cell table:formula="of:=VLOOKUP([.I45];[$レアリティ番号.$A$1:$レアリティ番号.$B$4];2;0)" office:value-type="float" office:value="4" calcext:value-type="float">
            <text:p>4</text:p>
          </table:table-cell>
          <table:table-cell office:value-type="string" calcext:value-type="string">
            <text:p>イジン</text:p>
          </table:table-cell>
          <table:table-cell table:formula="of:=VLOOKUP([.K45];[$種類番号.$A$1:$種類番号.$B$4];2;0)" office:value-type="float" office:value="1" calcext:value-type="float">
            <text:p>1</text:p>
          </table:table-cell>
          <table:table-cell office:value-type="string" calcext:value-type="string">
            <text:p>緑</text:p>
          </table:table-cell>
          <table:table-cell table:formula="of:=VLOOKUP([.M45];[$色番号.$A$1:$色番号.$B$5];2;0)" office:value-type="float" office:value="4" calcext:value-type="float">
            <text:p>4</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45];[$能力語番号.$A$1:$能力語番号.$B$10];2;0);0)" office:value-type="float" office:value="0" calcext:value-type="float">
            <text:p>0</text:p>
          </table:table-cell>
          <table:table-cell office:value-type="string" calcext:value-type="string">
            <text:p>音楽</text:p>
          </table:table-cell>
          <table:table-cell table:formula="of:=IFERROR(VLOOKUP([.$S45];[$特性番号.$A$1:$特性番号.$B$8];2;0);0)" office:value-type="float" office:value="4" calcext:value-type="float">
            <text:p>4</text:p>
          </table:table-cell>
          <table:table-cell office:value-type="string" calcext:value-type="string">
            <text:p>これが戦場にいる間、相手の戦場の「音楽」イジンと、相手の墓地のカードは能力すべてを失う。この能力は、能力によって失われない。</text:p>
          </table:table-cell>
          <table:table-cell table:style-name="ce8" table:formula="of:=NA()" office:value-type="string" office:string-value="" calcext:value-type="error">
            <text:p>#N/A</text:p>
          </table:table-cell>
          <table:table-cell table:formula="of:=IFERROR(VLOOKUP([.$V45];[$遺業能力番号.$A$1:$遺業能力番号.$B$9];2;0);0)" office:value-type="float" office:value="0" calcext:value-type="float">
            <text:p>0</text:p>
          </table:table-cell>
          <table:table-cell office:value-type="string" calcext:value-type="string">
            <text:p>https://one-draw.jp/ijinden/cardlist/001/card/01_005.png</text:p>
          </table:table-cell>
          <table:table-cell table:formula="of:=CONCATENATE([$JSON.$A$1];[.$C45];[$JSON.$B$1];[.$E45];[$JSON.$C$1];[.$F45];[$JSON.$D$1];IF(ISNA([.$S45]);&quot;null&quot;;&quot;&quot;&quot;&quot;&amp;[.$S45]&amp;&quot;&quot;&quot;&quot;);[$JSON.$E$1];[.$U45];[$JSON.$F$1];IF(ISNA([.$V45]);&quot;null&quot;;&quot;&quot;&quot;&quot;&amp;[.$V45]&amp;&quot;&quot;&quot;&quot;);[$JSON.$G$1];[.$X45];[$JSON.$H$1];[.$H45];[$JSON.$I$1];[.J45];[$JSON.$J$1];[.$L45];[$JSON.$K$1];[.$O45];[$JSON.$L$1];[.$N45];[$JSON.$M$1];[.$R45];[$JSON.$N$1];[.$T45];[$JSON.$O$1];[.$W45];[$JSON.$P$1];[.$A45];[$JSON.$Q$1];[.$B45];[$JSON.$R$1])" office:value-type="string" office:string-value="{&quot;id&quot;:&quot;1-5&quot;,&quot;name&quot;:&quot;ヴォルフガング・アマデウス・モーツァルト&quot;,&quot;kana&quot;:&quot;ゔぉるふがんぐあまでうすもーつぁると&quot;,&quot;traitText&quot;:&quot;音楽&quot;,&quot;ruleText&quot;:&quot;これが戦場にいる間、相手の戦場の「音楽」イジンと、相手の墓地のカードは能力すべてを失う。この能力は、能力によって失われない。&quot;,&quot;legacyText&quot;:null,&quot;imageUrl&quot;:&quot;https://one-draw.jp/ijinden/cardlist/001/card/01_005.png&quot;,&quot;expansion&quot;:15,&quot;rarity&quot;:4,&quot;type&quot;:1,&quot;level&quot;:7,&quot;color&quot;:4,&quot;term&quot;:0,&quot;trait&quot;:4,&quot;legacy&quot;:0,&quot;orderTable&quot;:44,&quot;orderDeck&quot;:208}," calcext:value-type="string">
            <text:p>{"id":"1-5","name":"ヴォルフガング・アマデウス・モーツァルト","kana":"ゔぉるふがんぐあまでうすもーつぁると","traitText":"音楽","ruleText":"これが戦場にいる間、相手の戦場の「音楽」イジンと、相手の墓地のカードは能力すべてを失う。この能力は、能力によって失われない。","legacyText":null,"imageUrl":"https://one-draw.jp/ijinden/cardlist/001/card/01_005.png","expansion":15,"rarity":4,"type":1,"level":7,"color":4,"term":0,"trait":4,"legacy":0,"orderTable":44,"orderDeck":208},</text:p>
          </table:table-cell>
          <table:table-cell table:number-columns-repeated="16347"/>
        </table:table-row>
        <table:table-row table:style-name="ro2">
          <table:table-cell office:value-type="float" office:value="45" calcext:value-type="float">
            <text:p>45</text:p>
          </table:table-cell>
          <table:table-cell office:value-type="float" office:value="222" calcext:value-type="float">
            <text:p>222</text:p>
          </table:table-cell>
          <table:table-cell office:value-type="string" calcext:value-type="string">
            <text:p>1-6</text:p>
          </table:table-cell>
          <table:table-cell office:value-type="float" office:value="6" calcext:value-type="float">
            <text:p>6</text:p>
          </table:table-cell>
          <table:table-cell office:value-type="string" calcext:value-type="string">
            <text:p>紫式部</text:p>
          </table:table-cell>
          <table:table-cell office:value-type="string" calcext:value-type="string">
            <text:p>むらさきしきぶ</text:p>
          </table:table-cell>
          <table:table-cell office:value-type="string" calcext:value-type="string">
            <text:p>第１弾ブースターパック</text:p>
          </table:table-cell>
          <table:table-cell table:formula="of:=VLOOKUP([.G46];[$収録番号.$A$1:$収録番号.$B$9];2;0)" office:value-type="float" office:value="15" calcext:value-type="float">
            <text:p>15</text:p>
          </table:table-cell>
          <table:table-cell office:value-type="string" calcext:value-type="string">
            <text:p>SR</text:p>
          </table:table-cell>
          <table:table-cell table:formula="of:=VLOOKUP([.I46];[$レアリティ番号.$A$1:$レアリティ番号.$B$4];2;0)" office:value-type="float" office:value="4" calcext:value-type="float">
            <text:p>4</text:p>
          </table:table-cell>
          <table:table-cell office:value-type="string" calcext:value-type="string">
            <text:p>イジン</text:p>
          </table:table-cell>
          <table:table-cell table:formula="of:=VLOOKUP([.K46];[$種類番号.$A$1:$種類番号.$B$4];2;0)" office:value-type="float" office:value="1" calcext:value-type="float">
            <text:p>1</text:p>
          </table:table-cell>
          <table:table-cell office:value-type="string" calcext:value-type="string">
            <text:p>緑</text:p>
          </table:table-cell>
          <table:table-cell table:formula="of:=VLOOKUP([.M46];[$色番号.$A$1:$色番号.$B$5];2;0)" office:value-type="float" office:value="4" calcext:value-type="float">
            <text:p>4</text:p>
          </table:table-cell>
          <table:table-cell office:value-type="float" office:value="8" calcext:value-type="float">
            <text:p>8</text:p>
          </table:table-cell>
          <table:table-cell table:formula="of:=NA()" office:value-type="string" office:string-value="" calcext:value-type="error">
            <text:p>#N/A</text:p>
          </table:table-cell>
          <table:table-cell office:value-type="string" calcext:value-type="string">
            <text:p>執筆</text:p>
          </table:table-cell>
          <table:table-cell table:formula="of:=IFERROR(VLOOKUP([.$Q46];[$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46];[$特性番号.$A$1:$特性番号.$B$8];2;0);0)" office:value-type="float" office:value="0" calcext:value-type="float">
            <text:p>0</text:p>
          </table:table-cell>
          <table:table-cell office:value-type="string" calcext:value-type="string">
            <text:p>執筆 - ハイケイが戦場に置かれるたび、相手の戦場のイジン1体を裏にして魔力ゾーンに置く。</text:p>
          </table:table-cell>
          <table:table-cell table:style-name="ce8" office:value-type="string" calcext:value-type="string">
            <text:p>魔力化</text:p>
          </table:table-cell>
          <table:table-cell table:formula="of:=IFERROR(VLOOKUP([.$V46];[$遺業能力番号.$A$1:$遺業能力番号.$B$9];2;0);0)" office:value-type="float" office:value="1" calcext:value-type="float">
            <text:p>1</text:p>
          </table:table-cell>
          <table:table-cell office:value-type="string" calcext:value-type="string">
            <text:p>https://one-draw.jp/ijinden/cardlist/001/card/01_006.png</text:p>
          </table:table-cell>
          <table:table-cell table:formula="of:=CONCATENATE([$JSON.$A$1];[.$C46];[$JSON.$B$1];[.$E46];[$JSON.$C$1];[.$F46];[$JSON.$D$1];IF(ISNA([.$S46]);&quot;null&quot;;&quot;&quot;&quot;&quot;&amp;[.$S46]&amp;&quot;&quot;&quot;&quot;);[$JSON.$E$1];[.$U46];[$JSON.$F$1];IF(ISNA([.$V46]);&quot;null&quot;;&quot;&quot;&quot;&quot;&amp;[.$V46]&amp;&quot;&quot;&quot;&quot;);[$JSON.$G$1];[.$X46];[$JSON.$H$1];[.$H46];[$JSON.$I$1];[.J46];[$JSON.$J$1];[.$L46];[$JSON.$K$1];[.$O46];[$JSON.$L$1];[.$N46];[$JSON.$M$1];[.$R46];[$JSON.$N$1];[.$T46];[$JSON.$O$1];[.$W46];[$JSON.$P$1];[.$A46];[$JSON.$Q$1];[.$B46];[$JSON.$R$1])" office:value-type="string" office:string-value="{&quot;id&quot;:&quot;1-6&quot;,&quot;name&quot;:&quot;紫式部&quot;,&quot;kana&quot;:&quot;むらさきしきぶ&quot;,&quot;traitText&quot;:null,&quot;ruleText&quot;:&quot;執筆 - ハイケイが戦場に置かれるたび、相手の戦場のイジン1体を裏にして魔力ゾーンに置く。&quot;,&quot;legacyText&quot;:&quot;魔力化&quot;,&quot;imageUrl&quot;:&quot;https://one-draw.jp/ijinden/cardlist/001/card/01_006.png&quot;,&quot;expansion&quot;:15,&quot;rarity&quot;:4,&quot;type&quot;:1,&quot;level&quot;:8,&quot;color&quot;:4,&quot;term&quot;:2,&quot;trait&quot;:0,&quot;legacy&quot;:1,&quot;orderTable&quot;:45,&quot;orderDeck&quot;:222}," calcext:value-type="string">
            <text:p>{"id":"1-6","name":"紫式部","kana":"むらさきしきぶ","traitText":null,"ruleText":"執筆 - ハイケイが戦場に置かれるたび、相手の戦場のイジン1体を裏にして魔力ゾーンに置く。","legacyText":"魔力化","imageUrl":"https://one-draw.jp/ijinden/cardlist/001/card/01_006.png","expansion":15,"rarity":4,"type":1,"level":8,"color":4,"term":2,"trait":0,"legacy":1,"orderTable":45,"orderDeck":222},</text:p>
          </table:table-cell>
          <table:table-cell table:number-columns-repeated="16347"/>
        </table:table-row>
        <table:table-row table:style-name="ro2">
          <table:table-cell office:value-type="float" office:value="46" calcext:value-type="float">
            <text:p>46</text:p>
          </table:table-cell>
          <table:table-cell office:value-type="float" office:value="2" calcext:value-type="float">
            <text:p>2</text:p>
          </table:table-cell>
          <table:table-cell office:value-type="string" calcext:value-type="string">
            <text:p>1-7</text:p>
          </table:table-cell>
          <table:table-cell office:value-type="float" office:value="7" calcext:value-type="float">
            <text:p>7</text:p>
          </table:table-cell>
          <table:table-cell office:value-type="string" calcext:value-type="string">
            <text:p>マーサ・ジェーン・カナリー</text:p>
          </table:table-cell>
          <table:table-cell office:value-type="string" calcext:value-type="string">
            <text:p>まーさじぇーんかなりー</text:p>
          </table:table-cell>
          <table:table-cell office:value-type="string" calcext:value-type="string">
            <text:p>第１弾ブースターパック</text:p>
          </table:table-cell>
          <table:table-cell table:formula="of:=VLOOKUP([.G47];[$収録番号.$A$1:$収録番号.$B$9];2;0)" office:value-type="float" office:value="15" calcext:value-type="float">
            <text:p>15</text:p>
          </table:table-cell>
          <table:table-cell office:value-type="string" calcext:value-type="string">
            <text:p>N</text:p>
          </table:table-cell>
          <table:table-cell table:formula="of:=VLOOKUP([.I47];[$レアリティ番号.$A$1:$レアリティ番号.$B$4];2;0)" office:value-type="float" office:value="1" calcext:value-type="float">
            <text:p>1</text:p>
          </table:table-cell>
          <table:table-cell office:value-type="string" calcext:value-type="string">
            <text:p>イジン</text:p>
          </table:table-cell>
          <table:table-cell table:formula="of:=VLOOKUP([.K47];[$種類番号.$A$1:$種類番号.$B$4];2;0)" office:value-type="float" office:value="1" calcext:value-type="float">
            <text:p>1</text:p>
          </table:table-cell>
          <table:table-cell office:value-type="string" calcext:value-type="string">
            <text:p>赤</text:p>
          </table:table-cell>
          <table:table-cell table:formula="of:=VLOOKUP([.M47];[$色番号.$A$1:$色番号.$B$5];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4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47];[$特性番号.$A$1:$特性番号.$B$8];2;0);0)" office:value-type="float" office:value="0" calcext:value-type="float">
            <text:p>0</text:p>
          </table:table-cell>
          <table:table-cell office:value-type="string" calcext:value-type="string">
            <text:p>戦場に他の赤のイジンがいる間「即応」を得る。</text:p>
          </table:table-cell>
          <table:table-cell table:style-name="ce8" office:value-type="string" calcext:value-type="string">
            <text:p>1ドローする</text:p>
          </table:table-cell>
          <table:table-cell table:formula="of:=IFERROR(VLOOKUP([.$V47];[$遺業能力番号.$A$1:$遺業能力番号.$B$9];2;0);0)" office:value-type="float" office:value="4" calcext:value-type="float">
            <text:p>4</text:p>
          </table:table-cell>
          <table:table-cell office:value-type="string" calcext:value-type="string">
            <text:p>https://one-draw.jp/ijinden/cardlist/001/card/01_007.png</text:p>
          </table:table-cell>
          <table:table-cell table:formula="of:=CONCATENATE([$JSON.$A$1];[.$C47];[$JSON.$B$1];[.$E47];[$JSON.$C$1];[.$F47];[$JSON.$D$1];IF(ISNA([.$S47]);&quot;null&quot;;&quot;&quot;&quot;&quot;&amp;[.$S47]&amp;&quot;&quot;&quot;&quot;);[$JSON.$E$1];[.$U47];[$JSON.$F$1];IF(ISNA([.$V47]);&quot;null&quot;;&quot;&quot;&quot;&quot;&amp;[.$V47]&amp;&quot;&quot;&quot;&quot;);[$JSON.$G$1];[.$X47];[$JSON.$H$1];[.$H47];[$JSON.$I$1];[.J47];[$JSON.$J$1];[.$L47];[$JSON.$K$1];[.$O47];[$JSON.$L$1];[.$N47];[$JSON.$M$1];[.$R47];[$JSON.$N$1];[.$T47];[$JSON.$O$1];[.$W47];[$JSON.$P$1];[.$A47];[$JSON.$Q$1];[.$B47];[$JSON.$R$1])" office:value-type="string" office:string-value="{&quot;id&quot;:&quot;1-7&quot;,&quot;name&quot;:&quot;マーサ・ジェーン・カナリー&quot;,&quot;kana&quot;:&quot;まーさじぇーんかなりー&quot;,&quot;traitText&quot;:null,&quot;ruleText&quot;:&quot;戦場に他の赤のイジンがいる間「即応」を得る。&quot;,&quot;legacyText&quot;:&quot;1ドローする&quot;,&quot;imageUrl&quot;:&quot;https://one-draw.jp/ijinden/cardlist/001/card/01_007.png&quot;,&quot;expansion&quot;:15,&quot;rarity&quot;:1,&quot;type&quot;:1,&quot;level&quot;:1,&quot;color&quot;:1,&quot;term&quot;:0,&quot;trait&quot;:0,&quot;legacy&quot;:4,&quot;orderTable&quot;:46,&quot;orderDeck&quot;:2}," calcext:value-type="string">
            <text:p>{"id":"1-7","name":"マーサ・ジェーン・カナリー","kana":"まーさじぇーんかなりー","traitText":null,"ruleText":"戦場に他の赤のイジンがいる間「即応」を得る。","legacyText":"1ドローする","imageUrl":"https://one-draw.jp/ijinden/cardlist/001/card/01_007.png","expansion":15,"rarity":1,"type":1,"level":1,"color":1,"term":0,"trait":0,"legacy":4,"orderTable":46,"orderDeck":2},</text:p>
          </table:table-cell>
          <table:table-cell table:number-columns-repeated="16347"/>
        </table:table-row>
        <table:table-row table:style-name="ro2">
          <table:table-cell office:value-type="float" office:value="47" calcext:value-type="float">
            <text:p>47</text:p>
          </table:table-cell>
          <table:table-cell office:value-type="float" office:value="25" calcext:value-type="float">
            <text:p>25</text:p>
          </table:table-cell>
          <table:table-cell office:value-type="string" calcext:value-type="string">
            <text:p>1-8</text:p>
          </table:table-cell>
          <table:table-cell office:value-type="float" office:value="8" calcext:value-type="float">
            <text:p>8</text:p>
          </table:table-cell>
          <table:table-cell office:value-type="string" calcext:value-type="string">
            <text:p>明智光秀</text:p>
          </table:table-cell>
          <table:table-cell office:value-type="string" calcext:value-type="string">
            <text:p>あけちみつひで</text:p>
          </table:table-cell>
          <table:table-cell office:value-type="string" calcext:value-type="string">
            <text:p>第１弾ブースターパック</text:p>
          </table:table-cell>
          <table:table-cell table:formula="of:=VLOOKUP([.G48];[$収録番号.$A$1:$収録番号.$B$9];2;0)" office:value-type="float" office:value="15" calcext:value-type="float">
            <text:p>15</text:p>
          </table:table-cell>
          <table:table-cell office:value-type="string" calcext:value-type="string">
            <text:p>N</text:p>
          </table:table-cell>
          <table:table-cell table:formula="of:=VLOOKUP([.I48];[$レアリティ番号.$A$1:$レアリティ番号.$B$4];2;0)" office:value-type="float" office:value="1" calcext:value-type="float">
            <text:p>1</text:p>
          </table:table-cell>
          <table:table-cell office:value-type="string" calcext:value-type="string">
            <text:p>イジン</text:p>
          </table:table-cell>
          <table:table-cell table:formula="of:=VLOOKUP([.K48];[$種類番号.$A$1:$種類番号.$B$4];2;0)" office:value-type="float" office:value="1" calcext:value-type="float">
            <text:p>1</text:p>
          </table:table-cell>
          <table:table-cell office:value-type="string" calcext:value-type="string">
            <text:p>赤</text:p>
          </table:table-cell>
          <table:table-cell table:formula="of:=VLOOKUP([.M48];[$色番号.$A$1:$色番号.$B$5];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48];[$能力語番号.$A$1:$能力語番号.$B$10];2;0);0)" office:value-type="float" office:value="0" calcext:value-type="float">
            <text:p>0</text:p>
          </table:table-cell>
          <table:table-cell office:value-type="string" calcext:value-type="string">
            <text:p>剣術</text:p>
          </table:table-cell>
          <table:table-cell table:formula="of:=IFERROR(VLOOKUP([.$S48];[$特性番号.$A$1:$特性番号.$B$8];2;0);0)" office:value-type="float" office:value="1" calcext:value-type="float">
            <text:p>1</text:p>
          </table:table-cell>
          <table:table-cell office:value-type="string" calcext:value-type="string">
            <text:p>即応¶戦場に置かれたとき、自分の戦場のガーディアン1体を山札の上に戻す。</text:p>
          </table:table-cell>
          <table:table-cell table:style-name="ce8" table:formula="of:=NA()" office:value-type="string" office:string-value="" calcext:value-type="error">
            <text:p>#N/A</text:p>
          </table:table-cell>
          <table:table-cell table:formula="of:=IFERROR(VLOOKUP([.$V48];[$遺業能力番号.$A$1:$遺業能力番号.$B$9];2;0);0)" office:value-type="float" office:value="0" calcext:value-type="float">
            <text:p>0</text:p>
          </table:table-cell>
          <table:table-cell office:value-type="string" calcext:value-type="string">
            <text:p>https://one-draw.jp/ijinden/cardlist/001/card/01_008.png</text:p>
          </table:table-cell>
          <table:table-cell table:formula="of:=CONCATENATE([$JSON.$A$1];[.$C48];[$JSON.$B$1];[.$E48];[$JSON.$C$1];[.$F48];[$JSON.$D$1];IF(ISNA([.$S48]);&quot;null&quot;;&quot;&quot;&quot;&quot;&amp;[.$S48]&amp;&quot;&quot;&quot;&quot;);[$JSON.$E$1];[.$U48];[$JSON.$F$1];IF(ISNA([.$V48]);&quot;null&quot;;&quot;&quot;&quot;&quot;&amp;[.$V48]&amp;&quot;&quot;&quot;&quot;);[$JSON.$G$1];[.$X48];[$JSON.$H$1];[.$H48];[$JSON.$I$1];[.J48];[$JSON.$J$1];[.$L48];[$JSON.$K$1];[.$O48];[$JSON.$L$1];[.$N48];[$JSON.$M$1];[.$R48];[$JSON.$N$1];[.$T48];[$JSON.$O$1];[.$W48];[$JSON.$P$1];[.$A48];[$JSON.$Q$1];[.$B48];[$JSON.$R$1])" office:value-type="string" office:string-value="{&quot;id&quot;:&quot;1-8&quot;,&quot;name&quot;:&quot;明智光秀&quot;,&quot;kana&quot;:&quot;あけちみつひで&quot;,&quot;traitText&quot;:&quot;剣術&quot;,&quot;ruleText&quot;:&quot;即応¶戦場に置かれたとき、自分の戦場のガーディアン1体を山札の上に戻す。&quot;,&quot;legacyText&quot;:null,&quot;imageUrl&quot;:&quot;https://one-draw.jp/ijinden/cardlist/001/card/01_008.png&quot;,&quot;expansion&quot;:15,&quot;rarity&quot;:1,&quot;type&quot;:1,&quot;level&quot;:2,&quot;color&quot;:1,&quot;term&quot;:0,&quot;trait&quot;:1,&quot;legacy&quot;:0,&quot;orderTable&quot;:47,&quot;orderDeck&quot;:25}," calcext:value-type="string">
            <text:p>{"id":"1-8","name":"明智光秀","kana":"あけちみつひで","traitText":"剣術","ruleText":"即応¶戦場に置かれたとき、自分の戦場のガーディアン1体を山札の上に戻す。","legacyText":null,"imageUrl":"https://one-draw.jp/ijinden/cardlist/001/card/01_008.png","expansion":15,"rarity":1,"type":1,"level":2,"color":1,"term":0,"trait":1,"legacy":0,"orderTable":47,"orderDeck":25},</text:p>
          </table:table-cell>
          <table:table-cell table:number-columns-repeated="16347"/>
        </table:table-row>
        <table:table-row table:style-name="ro2">
          <table:table-cell office:value-type="float" office:value="48" calcext:value-type="float">
            <text:p>48</text:p>
          </table:table-cell>
          <table:table-cell office:value-type="float" office:value="26" calcext:value-type="float">
            <text:p>26</text:p>
          </table:table-cell>
          <table:table-cell office:value-type="string" calcext:value-type="string">
            <text:p>1-9</text:p>
          </table:table-cell>
          <table:table-cell office:value-type="float" office:value="9" calcext:value-type="float">
            <text:p>9</text:p>
          </table:table-cell>
          <table:table-cell office:value-type="string" calcext:value-type="string">
            <text:p>藤原純友</text:p>
          </table:table-cell>
          <table:table-cell office:value-type="string" calcext:value-type="string">
            <text:p>ふじわらのすみとも</text:p>
          </table:table-cell>
          <table:table-cell office:value-type="string" calcext:value-type="string">
            <text:p>第１弾ブースターパック</text:p>
          </table:table-cell>
          <table:table-cell table:formula="of:=VLOOKUP([.G49];[$収録番号.$A$1:$収録番号.$B$9];2;0)" office:value-type="float" office:value="15" calcext:value-type="float">
            <text:p>15</text:p>
          </table:table-cell>
          <table:table-cell office:value-type="string" calcext:value-type="string">
            <text:p>N</text:p>
          </table:table-cell>
          <table:table-cell table:formula="of:=VLOOKUP([.I49];[$レアリティ番号.$A$1:$レアリティ番号.$B$4];2;0)" office:value-type="float" office:value="1" calcext:value-type="float">
            <text:p>1</text:p>
          </table:table-cell>
          <table:table-cell office:value-type="string" calcext:value-type="string">
            <text:p>イジン</text:p>
          </table:table-cell>
          <table:table-cell table:formula="of:=VLOOKUP([.K49];[$種類番号.$A$1:$種類番号.$B$4];2;0)" office:value-type="float" office:value="1" calcext:value-type="float">
            <text:p>1</text:p>
          </table:table-cell>
          <table:table-cell office:value-type="string" calcext:value-type="string">
            <text:p>赤</text:p>
          </table:table-cell>
          <table:table-cell table:formula="of:=VLOOKUP([.M49];[$色番号.$A$1:$色番号.$B$5];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航海</text:p>
          </table:table-cell>
          <table:table-cell table:formula="of:=IFERROR(VLOOKUP([.$Q49];[$能力語番号.$A$1:$能力語番号.$B$10];2;0);0)" office:value-type="float" office:value="1" calcext:value-type="float">
            <text:p>1</text:p>
          </table:table-cell>
          <table:table-cell office:value-type="string" calcext:value-type="string">
            <text:p>剣術</text:p>
          </table:table-cell>
          <table:table-cell table:formula="of:=IFERROR(VLOOKUP([.$S49];[$特性番号.$A$1:$特性番号.$B$8];2;0);0)" office:value-type="float" office:value="1" calcext:value-type="float">
            <text:p>1</text:p>
          </table:table-cell>
          <table:table-cell office:value-type="string" calcext:value-type="string">
            <text:p>航海 - アタッカーになったとき、相手の戦場のハイケイ1つを破壊する。</text:p>
          </table:table-cell>
          <table:table-cell table:style-name="ce8" office:value-type="string" calcext:value-type="string">
            <text:p>1ドローする</text:p>
          </table:table-cell>
          <table:table-cell table:formula="of:=IFERROR(VLOOKUP([.$V49];[$遺業能力番号.$A$1:$遺業能力番号.$B$9];2;0);0)" office:value-type="float" office:value="4" calcext:value-type="float">
            <text:p>4</text:p>
          </table:table-cell>
          <table:table-cell office:value-type="string" calcext:value-type="string">
            <text:p>https://one-draw.jp/ijinden/cardlist/001/card/01_009.png</text:p>
          </table:table-cell>
          <table:table-cell table:formula="of:=CONCATENATE([$JSON.$A$1];[.$C49];[$JSON.$B$1];[.$E49];[$JSON.$C$1];[.$F49];[$JSON.$D$1];IF(ISNA([.$S49]);&quot;null&quot;;&quot;&quot;&quot;&quot;&amp;[.$S49]&amp;&quot;&quot;&quot;&quot;);[$JSON.$E$1];[.$U49];[$JSON.$F$1];IF(ISNA([.$V49]);&quot;null&quot;;&quot;&quot;&quot;&quot;&amp;[.$V49]&amp;&quot;&quot;&quot;&quot;);[$JSON.$G$1];[.$X49];[$JSON.$H$1];[.$H49];[$JSON.$I$1];[.J49];[$JSON.$J$1];[.$L49];[$JSON.$K$1];[.$O49];[$JSON.$L$1];[.$N49];[$JSON.$M$1];[.$R49];[$JSON.$N$1];[.$T49];[$JSON.$O$1];[.$W49];[$JSON.$P$1];[.$A49];[$JSON.$Q$1];[.$B49];[$JSON.$R$1])" office:value-type="string" office:string-value="{&quot;id&quot;:&quot;1-9&quot;,&quot;name&quot;:&quot;藤原純友&quot;,&quot;kana&quot;:&quot;ふじわらのすみとも&quot;,&quot;traitText&quot;:&quot;剣術&quot;,&quot;ruleText&quot;:&quot;航海 - アタッカーになったとき、相手の戦場のハイケイ1つを破壊する。&quot;,&quot;legacyText&quot;:&quot;1ドローする&quot;,&quot;imageUrl&quot;:&quot;https://one-draw.jp/ijinden/cardlist/001/card/01_009.png&quot;,&quot;expansion&quot;:15,&quot;rarity&quot;:1,&quot;type&quot;:1,&quot;level&quot;:2,&quot;color&quot;:1,&quot;term&quot;:1,&quot;trait&quot;:1,&quot;legacy&quot;:4,&quot;orderTable&quot;:48,&quot;orderDeck&quot;:26}," calcext:value-type="string">
            <text:p>{"id":"1-9","name":"藤原純友","kana":"ふじわらのすみとも","traitText":"剣術","ruleText":"航海 - アタッカーになったとき、相手の戦場のハイケイ1つを破壊する。","legacyText":"1ドローする","imageUrl":"https://one-draw.jp/ijinden/cardlist/001/card/01_009.png","expansion":15,"rarity":1,"type":1,"level":2,"color":1,"term":1,"trait":1,"legacy":4,"orderTable":48,"orderDeck":26},</text:p>
          </table:table-cell>
          <table:table-cell table:number-columns-repeated="16347"/>
        </table:table-row>
        <table:table-row table:style-name="ro2">
          <table:table-cell office:value-type="float" office:value="49" calcext:value-type="float">
            <text:p>49</text:p>
          </table:table-cell>
          <table:table-cell office:value-type="float" office:value="64" calcext:value-type="float">
            <text:p>64</text:p>
          </table:table-cell>
          <table:table-cell office:value-type="string" calcext:value-type="string">
            <text:p>1-10</text:p>
          </table:table-cell>
          <table:table-cell office:value-type="float" office:value="10" calcext:value-type="float">
            <text:p>10</text:p>
          </table:table-cell>
          <table:table-cell office:value-type="string" calcext:value-type="string">
            <text:p>徳川家康</text:p>
          </table:table-cell>
          <table:table-cell office:value-type="string" calcext:value-type="string">
            <text:p>とくがわいえやす</text:p>
          </table:table-cell>
          <table:table-cell office:value-type="string" calcext:value-type="string">
            <text:p>第１弾ブースターパック</text:p>
          </table:table-cell>
          <table:table-cell table:formula="of:=VLOOKUP([.G50];[$収録番号.$A$1:$収録番号.$B$9];2;0)" office:value-type="float" office:value="15" calcext:value-type="float">
            <text:p>15</text:p>
          </table:table-cell>
          <table:table-cell office:value-type="string" calcext:value-type="string">
            <text:p>N</text:p>
          </table:table-cell>
          <table:table-cell table:formula="of:=VLOOKUP([.I50];[$レアリティ番号.$A$1:$レアリティ番号.$B$4];2;0)" office:value-type="float" office:value="1" calcext:value-type="float">
            <text:p>1</text:p>
          </table:table-cell>
          <table:table-cell office:value-type="string" calcext:value-type="string">
            <text:p>イジン</text:p>
          </table:table-cell>
          <table:table-cell table:formula="of:=VLOOKUP([.K50];[$種類番号.$A$1:$種類番号.$B$4];2;0)" office:value-type="float" office:value="1" calcext:value-type="float">
            <text:p>1</text:p>
          </table:table-cell>
          <table:table-cell office:value-type="string" calcext:value-type="string">
            <text:p>赤</text:p>
          </table:table-cell>
          <table:table-cell table:formula="of:=VLOOKUP([.M50];[$色番号.$A$1:$色番号.$B$5];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50];[$能力語番号.$A$1:$能力語番号.$B$10];2;0);0)" office:value-type="float" office:value="0" calcext:value-type="float">
            <text:p>0</text:p>
          </table:table-cell>
          <table:table-cell office:value-type="string" calcext:value-type="string">
            <text:p>剣術</text:p>
          </table:table-cell>
          <table:table-cell table:formula="of:=IFERROR(VLOOKUP([.$S50];[$特性番号.$A$1:$特性番号.$B$8];2;0);0)" office:value-type="float" office:value="1" calcext:value-type="float">
            <text:p>1</text:p>
          </table:table-cell>
          <table:table-cell office:value-type="string" calcext:value-type="string">
            <text:p>戦場に置かれたとき、イジン召喚権+1する。</text:p>
          </table:table-cell>
          <table:table-cell table:style-name="ce8" office:value-type="string" calcext:value-type="string">
            <text:p>1ドローする</text:p>
          </table:table-cell>
          <table:table-cell table:formula="of:=IFERROR(VLOOKUP([.$V50];[$遺業能力番号.$A$1:$遺業能力番号.$B$9];2;0);0)" office:value-type="float" office:value="4" calcext:value-type="float">
            <text:p>4</text:p>
          </table:table-cell>
          <table:table-cell office:value-type="string" calcext:value-type="string">
            <text:p>https://one-draw.jp/ijinden/cardlist/001/card/01_010.png</text:p>
          </table:table-cell>
          <table:table-cell table:formula="of:=CONCATENATE([$JSON.$A$1];[.$C50];[$JSON.$B$1];[.$E50];[$JSON.$C$1];[.$F50];[$JSON.$D$1];IF(ISNA([.$S50]);&quot;null&quot;;&quot;&quot;&quot;&quot;&amp;[.$S50]&amp;&quot;&quot;&quot;&quot;);[$JSON.$E$1];[.$U50];[$JSON.$F$1];IF(ISNA([.$V50]);&quot;null&quot;;&quot;&quot;&quot;&quot;&amp;[.$V50]&amp;&quot;&quot;&quot;&quot;);[$JSON.$G$1];[.$X50];[$JSON.$H$1];[.$H50];[$JSON.$I$1];[.J50];[$JSON.$J$1];[.$L50];[$JSON.$K$1];[.$O50];[$JSON.$L$1];[.$N50];[$JSON.$M$1];[.$R50];[$JSON.$N$1];[.$T50];[$JSON.$O$1];[.$W50];[$JSON.$P$1];[.$A50];[$JSON.$Q$1];[.$B50];[$JSON.$R$1])" office:value-type="string" office:string-value="{&quot;id&quot;:&quot;1-10&quot;,&quot;name&quot;:&quot;徳川家康&quot;,&quot;kana&quot;:&quot;とくがわいえやす&quot;,&quot;traitText&quot;:&quot;剣術&quot;,&quot;ruleText&quot;:&quot;戦場に置かれたとき、イジン召喚権+1する。&quot;,&quot;legacyText&quot;:&quot;1ドローする&quot;,&quot;imageUrl&quot;:&quot;https://one-draw.jp/ijinden/cardlist/001/card/01_010.png&quot;,&quot;expansion&quot;:15,&quot;rarity&quot;:1,&quot;type&quot;:1,&quot;level&quot;:3,&quot;color&quot;:1,&quot;term&quot;:0,&quot;trait&quot;:1,&quot;legacy&quot;:4,&quot;orderTable&quot;:49,&quot;orderDeck&quot;:64}," calcext:value-type="string">
            <text:p>{"id":"1-10","name":"徳川家康","kana":"とくがわいえやす","traitText":"剣術","ruleText":"戦場に置かれたとき、イジン召喚権+1する。","legacyText":"1ドローする","imageUrl":"https://one-draw.jp/ijinden/cardlist/001/card/01_010.png","expansion":15,"rarity":1,"type":1,"level":3,"color":1,"term":0,"trait":1,"legacy":4,"orderTable":49,"orderDeck":64},</text:p>
          </table:table-cell>
          <table:table-cell table:number-columns-repeated="16347"/>
        </table:table-row>
        <table:table-row table:style-name="ro2">
          <table:table-cell office:value-type="float" office:value="50" calcext:value-type="float">
            <text:p>50</text:p>
          </table:table-cell>
          <table:table-cell office:value-type="float" office:value="65" calcext:value-type="float">
            <text:p>65</text:p>
          </table:table-cell>
          <table:table-cell office:value-type="string" calcext:value-type="string">
            <text:p>1-11</text:p>
          </table:table-cell>
          <table:table-cell office:value-type="float" office:value="11" calcext:value-type="float">
            <text:p>11</text:p>
          </table:table-cell>
          <table:table-cell office:value-type="string" calcext:value-type="string">
            <text:p>直江兼続</text:p>
          </table:table-cell>
          <table:table-cell office:value-type="string" calcext:value-type="string">
            <text:p>なおえかねつぐ</text:p>
          </table:table-cell>
          <table:table-cell office:value-type="string" calcext:value-type="string">
            <text:p>第１弾ブースターパック</text:p>
          </table:table-cell>
          <table:table-cell table:formula="of:=VLOOKUP([.G51];[$収録番号.$A$1:$収録番号.$B$9];2;0)" office:value-type="float" office:value="15" calcext:value-type="float">
            <text:p>15</text:p>
          </table:table-cell>
          <table:table-cell office:value-type="string" calcext:value-type="string">
            <text:p>N</text:p>
          </table:table-cell>
          <table:table-cell table:formula="of:=VLOOKUP([.I51];[$レアリティ番号.$A$1:$レアリティ番号.$B$4];2;0)" office:value-type="float" office:value="1" calcext:value-type="float">
            <text:p>1</text:p>
          </table:table-cell>
          <table:table-cell office:value-type="string" calcext:value-type="string">
            <text:p>イジン</text:p>
          </table:table-cell>
          <table:table-cell table:formula="of:=VLOOKUP([.K51];[$種類番号.$A$1:$種類番号.$B$4];2;0)" office:value-type="float" office:value="1" calcext:value-type="float">
            <text:p>1</text:p>
          </table:table-cell>
          <table:table-cell office:value-type="string" calcext:value-type="string">
            <text:p>赤</text:p>
          </table:table-cell>
          <table:table-cell table:formula="of:=VLOOKUP([.M51];[$色番号.$A$1:$色番号.$B$5];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51];[$能力語番号.$A$1:$能力語番号.$B$10];2;0);0)" office:value-type="float" office:value="0" calcext:value-type="float">
            <text:p>0</text:p>
          </table:table-cell>
          <table:table-cell office:value-type="string" calcext:value-type="string">
            <text:p>剣術</text:p>
          </table:table-cell>
          <table:table-cell table:formula="of:=IFERROR(VLOOKUP([.$S51];[$特性番号.$A$1:$特性番号.$B$8];2;0);0)" office:value-type="float" office:value="1" calcext:value-type="float">
            <text:p>1</text:p>
          </table:table-cell>
          <table:table-cell office:value-type="string" calcext:value-type="string">
            <text:p>これが戦場にいる間、自分の戦場の「剣術」イジンは「アタック+2000」を得る。</text:p>
          </table:table-cell>
          <table:table-cell table:style-name="ce8" office:value-type="string" calcext:value-type="string">
            <text:p>1ドローする</text:p>
          </table:table-cell>
          <table:table-cell table:formula="of:=IFERROR(VLOOKUP([.$V51];[$遺業能力番号.$A$1:$遺業能力番号.$B$9];2;0);0)" office:value-type="float" office:value="4" calcext:value-type="float">
            <text:p>4</text:p>
          </table:table-cell>
          <table:table-cell office:value-type="string" calcext:value-type="string">
            <text:p>https://one-draw.jp/ijinden/cardlist/001/card/01_011.png</text:p>
          </table:table-cell>
          <table:table-cell table:formula="of:=CONCATENATE([$JSON.$A$1];[.$C51];[$JSON.$B$1];[.$E51];[$JSON.$C$1];[.$F51];[$JSON.$D$1];IF(ISNA([.$S51]);&quot;null&quot;;&quot;&quot;&quot;&quot;&amp;[.$S51]&amp;&quot;&quot;&quot;&quot;);[$JSON.$E$1];[.$U51];[$JSON.$F$1];IF(ISNA([.$V51]);&quot;null&quot;;&quot;&quot;&quot;&quot;&amp;[.$V51]&amp;&quot;&quot;&quot;&quot;);[$JSON.$G$1];[.$X51];[$JSON.$H$1];[.$H51];[$JSON.$I$1];[.J51];[$JSON.$J$1];[.$L51];[$JSON.$K$1];[.$O51];[$JSON.$L$1];[.$N51];[$JSON.$M$1];[.$R51];[$JSON.$N$1];[.$T51];[$JSON.$O$1];[.$W51];[$JSON.$P$1];[.$A51];[$JSON.$Q$1];[.$B51];[$JSON.$R$1])" office:value-type="string" office:string-value="{&quot;id&quot;:&quot;1-11&quot;,&quot;name&quot;:&quot;直江兼続&quot;,&quot;kana&quot;:&quot;なおえかねつぐ&quot;,&quot;traitText&quot;:&quot;剣術&quot;,&quot;ruleText&quot;:&quot;これが戦場にいる間、自分の戦場の「剣術」イジンは「アタック+2000」を得る。&quot;,&quot;legacyText&quot;:&quot;1ドローする&quot;,&quot;imageUrl&quot;:&quot;https://one-draw.jp/ijinden/cardlist/001/card/01_011.png&quot;,&quot;expansion&quot;:15,&quot;rarity&quot;:1,&quot;type&quot;:1,&quot;level&quot;:3,&quot;color&quot;:1,&quot;term&quot;:0,&quot;trait&quot;:1,&quot;legacy&quot;:4,&quot;orderTable&quot;:50,&quot;orderDeck&quot;:65}," calcext:value-type="string">
            <text:p>{"id":"1-11","name":"直江兼続","kana":"なおえかねつぐ","traitText":"剣術","ruleText":"これが戦場にいる間、自分の戦場の「剣術」イジンは「アタック+2000」を得る。","legacyText":"1ドローする","imageUrl":"https://one-draw.jp/ijinden/cardlist/001/card/01_011.png","expansion":15,"rarity":1,"type":1,"level":3,"color":1,"term":0,"trait":1,"legacy":4,"orderTable":50,"orderDeck":65},</text:p>
          </table:table-cell>
          <table:table-cell table:number-columns-repeated="16347"/>
        </table:table-row>
        <table:table-row table:style-name="ro2">
          <table:table-cell office:value-type="float" office:value="51" calcext:value-type="float">
            <text:p>51</text:p>
          </table:table-cell>
          <table:table-cell office:value-type="float" office:value="66" calcext:value-type="float">
            <text:p>66</text:p>
          </table:table-cell>
          <table:table-cell office:value-type="string" calcext:value-type="string">
            <text:p>1-12</text:p>
          </table:table-cell>
          <table:table-cell office:value-type="float" office:value="12" calcext:value-type="float">
            <text:p>12</text:p>
          </table:table-cell>
          <table:table-cell office:value-type="string" calcext:value-type="string">
            <text:p>藤原頼通</text:p>
          </table:table-cell>
          <table:table-cell office:value-type="string" calcext:value-type="string">
            <text:p>ふじわらのよりみち</text:p>
          </table:table-cell>
          <table:table-cell office:value-type="string" calcext:value-type="string">
            <text:p>第１弾ブースターパック</text:p>
          </table:table-cell>
          <table:table-cell table:formula="of:=VLOOKUP([.G52];[$収録番号.$A$1:$収録番号.$B$9];2;0)" office:value-type="float" office:value="15" calcext:value-type="float">
            <text:p>15</text:p>
          </table:table-cell>
          <table:table-cell office:value-type="string" calcext:value-type="string">
            <text:p>N</text:p>
          </table:table-cell>
          <table:table-cell table:formula="of:=VLOOKUP([.I52];[$レアリティ番号.$A$1:$レアリティ番号.$B$4];2;0)" office:value-type="float" office:value="1" calcext:value-type="float">
            <text:p>1</text:p>
          </table:table-cell>
          <table:table-cell office:value-type="string" calcext:value-type="string">
            <text:p>イジン</text:p>
          </table:table-cell>
          <table:table-cell table:formula="of:=VLOOKUP([.K52];[$種類番号.$A$1:$種類番号.$B$4];2;0)" office:value-type="float" office:value="1" calcext:value-type="float">
            <text:p>1</text:p>
          </table:table-cell>
          <table:table-cell office:value-type="string" calcext:value-type="string">
            <text:p>赤</text:p>
          </table:table-cell>
          <table:table-cell table:formula="of:=VLOOKUP([.M52];[$色番号.$A$1:$色番号.$B$5];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執筆</text:p>
          </table:table-cell>
          <table:table-cell table:formula="of:=IFERROR(VLOOKUP([.$Q52];[$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52];[$特性番号.$A$1:$特性番号.$B$8];2;0);0)" office:value-type="float" office:value="0" calcext:value-type="float">
            <text:p>0</text:p>
          </table:table-cell>
          <table:table-cell office:value-type="string" calcext:value-type="string">
            <text:p>執筆 - ハイケイが戦場に置かれるたび、そのハイケイのレベル以下のレベルを持つ墓地のマホウ1つを指定して発動できる。それを手札に戻す。</text:p>
          </table:table-cell>
          <table:table-cell table:style-name="ce8" office:value-type="string" calcext:value-type="string">
            <text:p>1ドローする</text:p>
          </table:table-cell>
          <table:table-cell table:formula="of:=IFERROR(VLOOKUP([.$V52];[$遺業能力番号.$A$1:$遺業能力番号.$B$9];2;0);0)" office:value-type="float" office:value="4" calcext:value-type="float">
            <text:p>4</text:p>
          </table:table-cell>
          <table:table-cell office:value-type="string" calcext:value-type="string">
            <text:p>https://one-draw.jp/ijinden/cardlist/001/card/01_012.png</text:p>
          </table:table-cell>
          <table:table-cell table:formula="of:=CONCATENATE([$JSON.$A$1];[.$C52];[$JSON.$B$1];[.$E52];[$JSON.$C$1];[.$F52];[$JSON.$D$1];IF(ISNA([.$S52]);&quot;null&quot;;&quot;&quot;&quot;&quot;&amp;[.$S52]&amp;&quot;&quot;&quot;&quot;);[$JSON.$E$1];[.$U52];[$JSON.$F$1];IF(ISNA([.$V52]);&quot;null&quot;;&quot;&quot;&quot;&quot;&amp;[.$V52]&amp;&quot;&quot;&quot;&quot;);[$JSON.$G$1];[.$X52];[$JSON.$H$1];[.$H52];[$JSON.$I$1];[.J52];[$JSON.$J$1];[.$L52];[$JSON.$K$1];[.$O52];[$JSON.$L$1];[.$N52];[$JSON.$M$1];[.$R52];[$JSON.$N$1];[.$T52];[$JSON.$O$1];[.$W52];[$JSON.$P$1];[.$A52];[$JSON.$Q$1];[.$B52];[$JSON.$R$1])" office:value-type="string" office:string-value="{&quot;id&quot;:&quot;1-12&quot;,&quot;name&quot;:&quot;藤原頼通&quot;,&quot;kana&quot;:&quot;ふじわらのよりみち&quot;,&quot;traitText&quot;:null,&quot;ruleText&quot;:&quot;執筆 - ハイケイが戦場に置かれるたび、そのハイケイのレベル以下のレベルを持つ墓地のマホウ1つを指定して発動できる。それを手札に戻す。&quot;,&quot;legacyText&quot;:&quot;1ドローする&quot;,&quot;imageUrl&quot;:&quot;https://one-draw.jp/ijinden/cardlist/001/card/01_012.png&quot;,&quot;expansion&quot;:15,&quot;rarity&quot;:1,&quot;type&quot;:1,&quot;level&quot;:3,&quot;color&quot;:1,&quot;term&quot;:2,&quot;trait&quot;:0,&quot;legacy&quot;:4,&quot;orderTable&quot;:51,&quot;orderDeck&quot;:66}," calcext:value-type="string">
            <text:p>{"id":"1-12","name":"藤原頼通","kana":"ふじわらのよりみち","traitText":null,"ruleText":"執筆 - ハイケイが戦場に置かれるたび、そのハイケイのレベル以下のレベルを持つ墓地のマホウ1つを指定して発動できる。それを手札に戻す。","legacyText":"1ドローする","imageUrl":"https://one-draw.jp/ijinden/cardlist/001/card/01_012.png","expansion":15,"rarity":1,"type":1,"level":3,"color":1,"term":2,"trait":0,"legacy":4,"orderTable":51,"orderDeck":66},</text:p>
          </table:table-cell>
          <table:table-cell table:number-columns-repeated="16347"/>
        </table:table-row>
        <table:table-row table:style-name="ro2">
          <table:table-cell office:value-type="float" office:value="52" calcext:value-type="float">
            <text:p>52</text:p>
          </table:table-cell>
          <table:table-cell office:value-type="float" office:value="67" calcext:value-type="float">
            <text:p>67</text:p>
          </table:table-cell>
          <table:table-cell office:value-type="string" calcext:value-type="string">
            <text:p>1-13</text:p>
          </table:table-cell>
          <table:table-cell office:value-type="float" office:value="13" calcext:value-type="float">
            <text:p>13</text:p>
          </table:table-cell>
          <table:table-cell office:value-type="string" calcext:value-type="string">
            <text:p>北条政子</text:p>
          </table:table-cell>
          <table:table-cell office:value-type="string" calcext:value-type="string">
            <text:p>ほうじょうまさこ</text:p>
          </table:table-cell>
          <table:table-cell office:value-type="string" calcext:value-type="string">
            <text:p>第１弾ブースターパック</text:p>
          </table:table-cell>
          <table:table-cell table:formula="of:=VLOOKUP([.G53];[$収録番号.$A$1:$収録番号.$B$9];2;0)" office:value-type="float" office:value="15" calcext:value-type="float">
            <text:p>15</text:p>
          </table:table-cell>
          <table:table-cell office:value-type="string" calcext:value-type="string">
            <text:p>R</text:p>
          </table:table-cell>
          <table:table-cell table:formula="of:=VLOOKUP([.I53];[$レアリティ番号.$A$1:$レアリティ番号.$B$4];2;0)" office:value-type="float" office:value="2" calcext:value-type="float">
            <text:p>2</text:p>
          </table:table-cell>
          <table:table-cell office:value-type="string" calcext:value-type="string">
            <text:p>イジン</text:p>
          </table:table-cell>
          <table:table-cell table:formula="of:=VLOOKUP([.K53];[$種類番号.$A$1:$種類番号.$B$4];2;0)" office:value-type="float" office:value="1" calcext:value-type="float">
            <text:p>1</text:p>
          </table:table-cell>
          <table:table-cell office:value-type="string" calcext:value-type="string">
            <text:p>赤</text:p>
          </table:table-cell>
          <table:table-cell table:formula="of:=VLOOKUP([.M53];[$色番号.$A$1:$色番号.$B$5];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5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53];[$特性番号.$A$1:$特性番号.$B$8];2;0);0)" office:value-type="float" office:value="0" calcext:value-type="float">
            <text:p>0</text:p>
          </table:table-cell>
          <table:table-cell office:value-type="string" calcext:value-type="string">
            <text:p>戦場に置かれたとき、これのパワー以下のパワーを持つ相手の戦場のイジン1体を破壊する。¶これが戦場にいる間、自分の戦場の「剣術」イジンは「パワー+1000」を得る。</text:p>
          </table:table-cell>
          <table:table-cell table:style-name="ce8" table:formula="of:=NA()" office:value-type="string" office:string-value="" calcext:value-type="error">
            <text:p>#N/A</text:p>
          </table:table-cell>
          <table:table-cell table:formula="of:=IFERROR(VLOOKUP([.$V53];[$遺業能力番号.$A$1:$遺業能力番号.$B$9];2;0);0)" office:value-type="float" office:value="0" calcext:value-type="float">
            <text:p>0</text:p>
          </table:table-cell>
          <table:table-cell office:value-type="string" calcext:value-type="string">
            <text:p>https://one-draw.jp/ijinden/cardlist/001/card/01_013.png</text:p>
          </table:table-cell>
          <table:table-cell table:formula="of:=CONCATENATE([$JSON.$A$1];[.$C53];[$JSON.$B$1];[.$E53];[$JSON.$C$1];[.$F53];[$JSON.$D$1];IF(ISNA([.$S53]);&quot;null&quot;;&quot;&quot;&quot;&quot;&amp;[.$S53]&amp;&quot;&quot;&quot;&quot;);[$JSON.$E$1];[.$U53];[$JSON.$F$1];IF(ISNA([.$V53]);&quot;null&quot;;&quot;&quot;&quot;&quot;&amp;[.$V53]&amp;&quot;&quot;&quot;&quot;);[$JSON.$G$1];[.$X53];[$JSON.$H$1];[.$H53];[$JSON.$I$1];[.J53];[$JSON.$J$1];[.$L53];[$JSON.$K$1];[.$O53];[$JSON.$L$1];[.$N53];[$JSON.$M$1];[.$R53];[$JSON.$N$1];[.$T53];[$JSON.$O$1];[.$W53];[$JSON.$P$1];[.$A53];[$JSON.$Q$1];[.$B53];[$JSON.$R$1])" office:value-type="string" office:string-value="{&quot;id&quot;:&quot;1-13&quot;,&quot;name&quot;:&quot;北条政子&quot;,&quot;kana&quot;:&quot;ほうじょうまさこ&quot;,&quot;traitText&quot;:null,&quot;ruleText&quot;:&quot;戦場に置かれたとき、これのパワー以下のパワーを持つ相手の戦場のイジン1体を破壊する。¶これが戦場にいる間、自分の戦場の「剣術」イジンは「パワー+1000」を得る。&quot;,&quot;legacyText&quot;:null,&quot;imageUrl&quot;:&quot;https://one-draw.jp/ijinden/cardlist/001/card/01_013.png&quot;,&quot;expansion&quot;:15,&quot;rarity&quot;:2,&quot;type&quot;:1,&quot;level&quot;:3,&quot;color&quot;:1,&quot;term&quot;:0,&quot;trait&quot;:0,&quot;legacy&quot;:0,&quot;orderTable&quot;:52,&quot;orderDeck&quot;:67}," calcext:value-type="string">
            <text:p>{"id":"1-13","name":"北条政子","kana":"ほうじょうまさこ","traitText":null,"ruleText":"戦場に置かれたとき、これのパワー以下のパワーを持つ相手の戦場のイジン1体を破壊する。¶これが戦場にいる間、自分の戦場の「剣術」イジンは「パワー+1000」を得る。","legacyText":null,"imageUrl":"https://one-draw.jp/ijinden/cardlist/001/card/01_013.png","expansion":15,"rarity":2,"type":1,"level":3,"color":1,"term":0,"trait":0,"legacy":0,"orderTable":52,"orderDeck":67},</text:p>
          </table:table-cell>
          <table:table-cell table:number-columns-repeated="16347"/>
        </table:table-row>
        <table:table-row table:style-name="ro2">
          <table:table-cell office:value-type="float" office:value="53" calcext:value-type="float">
            <text:p>53</text:p>
          </table:table-cell>
          <table:table-cell office:value-type="float" office:value="108" calcext:value-type="float">
            <text:p>108</text:p>
          </table:table-cell>
          <table:table-cell office:value-type="string" calcext:value-type="string">
            <text:p>1-14</text:p>
          </table:table-cell>
          <table:table-cell office:value-type="float" office:value="14" calcext:value-type="float">
            <text:p>14</text:p>
          </table:table-cell>
          <table:table-cell office:value-type="string" calcext:value-type="string">
            <text:p>ジョージ・アームストロング・カスター</text:p>
          </table:table-cell>
          <table:table-cell office:value-type="string" calcext:value-type="string">
            <text:p>じょーじあーむすとろんぐかすたー</text:p>
          </table:table-cell>
          <table:table-cell office:value-type="string" calcext:value-type="string">
            <text:p>第１弾ブースターパック</text:p>
          </table:table-cell>
          <table:table-cell table:formula="of:=VLOOKUP([.G54];[$収録番号.$A$1:$収録番号.$B$9];2;0)" office:value-type="float" office:value="15" calcext:value-type="float">
            <text:p>15</text:p>
          </table:table-cell>
          <table:table-cell office:value-type="string" calcext:value-type="string">
            <text:p>N</text:p>
          </table:table-cell>
          <table:table-cell table:formula="of:=VLOOKUP([.I54];[$レアリティ番号.$A$1:$レアリティ番号.$B$4];2;0)" office:value-type="float" office:value="1" calcext:value-type="float">
            <text:p>1</text:p>
          </table:table-cell>
          <table:table-cell office:value-type="string" calcext:value-type="string">
            <text:p>イジン</text:p>
          </table:table-cell>
          <table:table-cell table:formula="of:=VLOOKUP([.K54];[$種類番号.$A$1:$種類番号.$B$4];2;0)" office:value-type="float" office:value="1" calcext:value-type="float">
            <text:p>1</text:p>
          </table:table-cell>
          <table:table-cell office:value-type="string" calcext:value-type="string">
            <text:p>赤</text:p>
          </table:table-cell>
          <table:table-cell table:formula="of:=VLOOKUP([.M54];[$色番号.$A$1:$色番号.$B$5];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5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54];[$特性番号.$A$1:$特性番号.$B$8];2;0);0)" office:value-type="float" office:value="0" calcext:value-type="float">
            <text:p>0</text:p>
          </table:table-cell>
          <table:table-cell office:value-type="string" calcext:value-type="string">
            <text:p>即応¶これが戦場にいる間「即応」を持つ自分の戦場のイジンは「アタック+1000」を得る。</text:p>
          </table:table-cell>
          <table:table-cell table:style-name="ce8" office:value-type="string" calcext:value-type="string">
            <text:p>1ドローする</text:p>
          </table:table-cell>
          <table:table-cell table:formula="of:=IFERROR(VLOOKUP([.$V54];[$遺業能力番号.$A$1:$遺業能力番号.$B$9];2;0);0)" office:value-type="float" office:value="4" calcext:value-type="float">
            <text:p>4</text:p>
          </table:table-cell>
          <table:table-cell office:value-type="string" calcext:value-type="string">
            <text:p>https://one-draw.jp/ijinden/cardlist/001/card/01_014.png</text:p>
          </table:table-cell>
          <table:table-cell table:formula="of:=CONCATENATE([$JSON.$A$1];[.$C54];[$JSON.$B$1];[.$E54];[$JSON.$C$1];[.$F54];[$JSON.$D$1];IF(ISNA([.$S54]);&quot;null&quot;;&quot;&quot;&quot;&quot;&amp;[.$S54]&amp;&quot;&quot;&quot;&quot;);[$JSON.$E$1];[.$U54];[$JSON.$F$1];IF(ISNA([.$V54]);&quot;null&quot;;&quot;&quot;&quot;&quot;&amp;[.$V54]&amp;&quot;&quot;&quot;&quot;);[$JSON.$G$1];[.$X54];[$JSON.$H$1];[.$H54];[$JSON.$I$1];[.J54];[$JSON.$J$1];[.$L54];[$JSON.$K$1];[.$O54];[$JSON.$L$1];[.$N54];[$JSON.$M$1];[.$R54];[$JSON.$N$1];[.$T54];[$JSON.$O$1];[.$W54];[$JSON.$P$1];[.$A54];[$JSON.$Q$1];[.$B54];[$JSON.$R$1])" office:value-type="string" office:string-value="{&quot;id&quot;:&quot;1-14&quot;,&quot;name&quot;:&quot;ジョージ・アームストロング・カスター&quot;,&quot;kana&quot;:&quot;じょーじあーむすとろんぐかすたー&quot;,&quot;traitText&quot;:null,&quot;ruleText&quot;:&quot;即応¶これが戦場にいる間「即応」を持つ自分の戦場のイジンは「アタック+1000」を得る。&quot;,&quot;legacyText&quot;:&quot;1ドローする&quot;,&quot;imageUrl&quot;:&quot;https://one-draw.jp/ijinden/cardlist/001/card/01_014.png&quot;,&quot;expansion&quot;:15,&quot;rarity&quot;:1,&quot;type&quot;:1,&quot;level&quot;:4,&quot;color&quot;:1,&quot;term&quot;:0,&quot;trait&quot;:0,&quot;legacy&quot;:4,&quot;orderTable&quot;:53,&quot;orderDeck&quot;:108}," calcext:value-type="string">
            <text:p>{"id":"1-14","name":"ジョージ・アームストロング・カスター","kana":"じょーじあーむすとろんぐかすたー","traitText":null,"ruleText":"即応¶これが戦場にいる間「即応」を持つ自分の戦場のイジンは「アタック+1000」を得る。","legacyText":"1ドローする","imageUrl":"https://one-draw.jp/ijinden/cardlist/001/card/01_014.png","expansion":15,"rarity":1,"type":1,"level":4,"color":1,"term":0,"trait":0,"legacy":4,"orderTable":53,"orderDeck":108},</text:p>
          </table:table-cell>
          <table:table-cell table:number-columns-repeated="16347"/>
        </table:table-row>
        <table:table-row table:style-name="ro2">
          <table:table-cell office:value-type="float" office:value="54" calcext:value-type="float">
            <text:p>54</text:p>
          </table:table-cell>
          <table:table-cell office:value-type="float" office:value="109" calcext:value-type="float">
            <text:p>109</text:p>
          </table:table-cell>
          <table:table-cell office:value-type="string" calcext:value-type="string">
            <text:p>1-15</text:p>
          </table:table-cell>
          <table:table-cell office:value-type="float" office:value="15" calcext:value-type="float">
            <text:p>15</text:p>
          </table:table-cell>
          <table:table-cell office:value-type="string" calcext:value-type="string">
            <text:p>中臣鎌足</text:p>
          </table:table-cell>
          <table:table-cell office:value-type="string" calcext:value-type="string">
            <text:p>なかとみのかまたり</text:p>
          </table:table-cell>
          <table:table-cell office:value-type="string" calcext:value-type="string">
            <text:p>第１弾ブースターパック</text:p>
          </table:table-cell>
          <table:table-cell table:formula="of:=VLOOKUP([.G55];[$収録番号.$A$1:$収録番号.$B$9];2;0)" office:value-type="float" office:value="15" calcext:value-type="float">
            <text:p>15</text:p>
          </table:table-cell>
          <table:table-cell office:value-type="string" calcext:value-type="string">
            <text:p>R</text:p>
          </table:table-cell>
          <table:table-cell table:formula="of:=VLOOKUP([.I55];[$レアリティ番号.$A$1:$レアリティ番号.$B$4];2;0)" office:value-type="float" office:value="2" calcext:value-type="float">
            <text:p>2</text:p>
          </table:table-cell>
          <table:table-cell office:value-type="string" calcext:value-type="string">
            <text:p>イジン</text:p>
          </table:table-cell>
          <table:table-cell table:formula="of:=VLOOKUP([.K55];[$種類番号.$A$1:$種類番号.$B$4];2;0)" office:value-type="float" office:value="1" calcext:value-type="float">
            <text:p>1</text:p>
          </table:table-cell>
          <table:table-cell office:value-type="string" calcext:value-type="string">
            <text:p>赤</text:p>
          </table:table-cell>
          <table:table-cell table:formula="of:=VLOOKUP([.M55];[$色番号.$A$1:$色番号.$B$10];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5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55];[$特性番号.$A$1:$特性番号.$B$8];2;0);0)" office:value-type="float" office:value="0" calcext:value-type="float">
            <text:p>0</text:p>
          </table:table-cell>
          <table:table-cell office:value-type="string" calcext:value-type="string">
            <text:p>戦場に置かれたとき、自分の山札の上から5枚を墓地に置いて発動できる。このターンの間「即応」を得る。</text:p>
          </table:table-cell>
          <table:table-cell table:style-name="ce8" table:formula="of:=NA()" office:value-type="string" office:string-value="" calcext:value-type="error">
            <text:p>#N/A</text:p>
          </table:table-cell>
          <table:table-cell table:formula="of:=IFERROR(VLOOKUP([.$V55];[$遺業能力番号.$A$1:$遺業能力番号.$B$9];2;0);0)" office:value-type="float" office:value="0" calcext:value-type="float">
            <text:p>0</text:p>
          </table:table-cell>
          <table:table-cell office:value-type="string" calcext:value-type="string">
            <text:p>https://one-draw.jp/ijinden/cardlist/001/card/01_015.png</text:p>
          </table:table-cell>
          <table:table-cell table:formula="of:=CONCATENATE([$JSON.$A$1];[.$C55];[$JSON.$B$1];[.$E55];[$JSON.$C$1];[.$F55];[$JSON.$D$1];IF(ISNA([.$S55]);&quot;null&quot;;&quot;&quot;&quot;&quot;&amp;[.$S55]&amp;&quot;&quot;&quot;&quot;);[$JSON.$E$1];[.$U55];[$JSON.$F$1];IF(ISNA([.$V55]);&quot;null&quot;;&quot;&quot;&quot;&quot;&amp;[.$V55]&amp;&quot;&quot;&quot;&quot;);[$JSON.$G$1];[.$X55];[$JSON.$H$1];[.$H55];[$JSON.$I$1];[.J55];[$JSON.$J$1];[.$L55];[$JSON.$K$1];[.$O55];[$JSON.$L$1];[.$N55];[$JSON.$M$1];[.$R55];[$JSON.$N$1];[.$T55];[$JSON.$O$1];[.$W55];[$JSON.$P$1];[.$A55];[$JSON.$Q$1];[.$B55];[$JSON.$R$1])" office:value-type="string" office:string-value="{&quot;id&quot;:&quot;1-15&quot;,&quot;name&quot;:&quot;中臣鎌足&quot;,&quot;kana&quot;:&quot;なかとみのかまたり&quot;,&quot;traitText&quot;:null,&quot;ruleText&quot;:&quot;戦場に置かれたとき、自分の山札の上から5枚を墓地に置いて発動できる。このターンの間「即応」を得る。&quot;,&quot;legacyText&quot;:null,&quot;imageUrl&quot;:&quot;https://one-draw.jp/ijinden/cardlist/001/card/01_015.png&quot;,&quot;expansion&quot;:15,&quot;rarity&quot;:2,&quot;type&quot;:1,&quot;level&quot;:4,&quot;color&quot;:1,&quot;term&quot;:0,&quot;trait&quot;:0,&quot;legacy&quot;:0,&quot;orderTable&quot;:54,&quot;orderDeck&quot;:109}," calcext:value-type="string">
            <text:p>{"id":"1-15","name":"中臣鎌足","kana":"なかとみのかまたり","traitText":null,"ruleText":"戦場に置かれたとき、自分の山札の上から5枚を墓地に置いて発動できる。このターンの間「即応」を得る。","legacyText":null,"imageUrl":"https://one-draw.jp/ijinden/cardlist/001/card/01_015.png","expansion":15,"rarity":2,"type":1,"level":4,"color":1,"term":0,"trait":0,"legacy":0,"orderTable":54,"orderDeck":109},</text:p>
          </table:table-cell>
          <table:table-cell table:number-columns-repeated="16347"/>
        </table:table-row>
        <table:table-row table:style-name="ro2">
          <table:table-cell office:value-type="float" office:value="55" calcext:value-type="float">
            <text:p>55</text:p>
          </table:table-cell>
          <table:table-cell office:value-type="float" office:value="110" calcext:value-type="float">
            <text:p>110</text:p>
          </table:table-cell>
          <table:table-cell office:value-type="string" calcext:value-type="string">
            <text:p>1-16</text:p>
          </table:table-cell>
          <table:table-cell office:value-type="float" office:value="16" calcext:value-type="float">
            <text:p>16</text:p>
          </table:table-cell>
          <table:table-cell office:value-type="string" calcext:value-type="string">
            <text:p>マルクス・アントニウス</text:p>
          </table:table-cell>
          <table:table-cell office:value-type="string" calcext:value-type="string">
            <text:p>まるくすあんとにうす</text:p>
          </table:table-cell>
          <table:table-cell office:value-type="string" calcext:value-type="string">
            <text:p>第１弾ブースターパック</text:p>
          </table:table-cell>
          <table:table-cell table:formula="of:=VLOOKUP([.G56];[$収録番号.$A$1:$収録番号.$B$9];2;0)" office:value-type="float" office:value="15" calcext:value-type="float">
            <text:p>15</text:p>
          </table:table-cell>
          <table:table-cell office:value-type="string" calcext:value-type="string">
            <text:p>N</text:p>
          </table:table-cell>
          <table:table-cell table:formula="of:=VLOOKUP([.I56];[$レアリティ番号.$A$1:$レアリティ番号.$B$4];2;0)" office:value-type="float" office:value="1" calcext:value-type="float">
            <text:p>1</text:p>
          </table:table-cell>
          <table:table-cell office:value-type="string" calcext:value-type="string">
            <text:p>イジン</text:p>
          </table:table-cell>
          <table:table-cell table:formula="of:=VLOOKUP([.K56];[$種類番号.$A$1:$種類番号.$B$4];2;0)" office:value-type="float" office:value="1" calcext:value-type="float">
            <text:p>1</text:p>
          </table:table-cell>
          <table:table-cell office:value-type="string" calcext:value-type="string">
            <text:p>赤</text:p>
          </table:table-cell>
          <table:table-cell table:formula="of:=VLOOKUP([.M56];[$色番号.$A$1:$色番号.$B$10];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5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56];[$特性番号.$A$1:$特性番号.$B$8];2;0);0)" office:value-type="float" office:value="0" calcext:value-type="float">
            <text:p>0</text:p>
          </table:table-cell>
          <table:table-cell office:value-type="string" calcext:value-type="string">
            <text:p>戦場に置かれたとき、自分の戦場のガーディアン1体を裏のまま魔力ゾーンに置いて発動できる。イジン召喚権+1する。¶アタック+2000</text:p>
          </table:table-cell>
          <table:table-cell table:style-name="ce8" table:formula="of:=NA()" office:value-type="string" office:string-value="" calcext:value-type="error">
            <text:p>#N/A</text:p>
          </table:table-cell>
          <table:table-cell table:formula="of:=IFERROR(VLOOKUP([.$V56];[$遺業能力番号.$A$1:$遺業能力番号.$B$9];2;0);0)" office:value-type="float" office:value="0" calcext:value-type="float">
            <text:p>0</text:p>
          </table:table-cell>
          <table:table-cell office:value-type="string" calcext:value-type="string">
            <text:p>https://one-draw.jp/ijinden/cardlist/001/card/01_016.png</text:p>
          </table:table-cell>
          <table:table-cell table:formula="of:=CONCATENATE([$JSON.$A$1];[.$C56];[$JSON.$B$1];[.$E56];[$JSON.$C$1];[.$F56];[$JSON.$D$1];IF(ISNA([.$S56]);&quot;null&quot;;&quot;&quot;&quot;&quot;&amp;[.$S56]&amp;&quot;&quot;&quot;&quot;);[$JSON.$E$1];[.$U56];[$JSON.$F$1];IF(ISNA([.$V56]);&quot;null&quot;;&quot;&quot;&quot;&quot;&amp;[.$V56]&amp;&quot;&quot;&quot;&quot;);[$JSON.$G$1];[.$X56];[$JSON.$H$1];[.$H56];[$JSON.$I$1];[.J56];[$JSON.$J$1];[.$L56];[$JSON.$K$1];[.$O56];[$JSON.$L$1];[.$N56];[$JSON.$M$1];[.$R56];[$JSON.$N$1];[.$T56];[$JSON.$O$1];[.$W56];[$JSON.$P$1];[.$A56];[$JSON.$Q$1];[.$B56];[$JSON.$R$1])" office:value-type="string" office:string-value="{&quot;id&quot;:&quot;1-16&quot;,&quot;name&quot;:&quot;マルクス・アントニウス&quot;,&quot;kana&quot;:&quot;まるくすあんとにうす&quot;,&quot;traitText&quot;:null,&quot;ruleText&quot;:&quot;戦場に置かれたとき、自分の戦場のガーディアン1体を裏のまま魔力ゾーンに置いて発動できる。イジン召喚権+1する。¶アタック+2000&quot;,&quot;legacyText&quot;:null,&quot;imageUrl&quot;:&quot;https://one-draw.jp/ijinden/cardlist/001/card/01_016.png&quot;,&quot;expansion&quot;:15,&quot;rarity&quot;:1,&quot;type&quot;:1,&quot;level&quot;:4,&quot;color&quot;:1,&quot;term&quot;:0,&quot;trait&quot;:0,&quot;legacy&quot;:0,&quot;orderTable&quot;:55,&quot;orderDeck&quot;:110}," calcext:value-type="string">
            <text:p>{"id":"1-16","name":"マルクス・アントニウス","kana":"まるくすあんとにうす","traitText":null,"ruleText":"戦場に置かれたとき、自分の戦場のガーディアン1体を裏のまま魔力ゾーンに置いて発動できる。イジン召喚権+1する。¶アタック+2000","legacyText":null,"imageUrl":"https://one-draw.jp/ijinden/cardlist/001/card/01_016.png","expansion":15,"rarity":1,"type":1,"level":4,"color":1,"term":0,"trait":0,"legacy":0,"orderTable":55,"orderDeck":110},</text:p>
          </table:table-cell>
          <table:table-cell table:number-columns-repeated="16347"/>
        </table:table-row>
        <table:table-row table:style-name="ro2">
          <table:table-cell office:value-type="float" office:value="56" calcext:value-type="float">
            <text:p>56</text:p>
          </table:table-cell>
          <table:table-cell office:value-type="float" office:value="146" calcext:value-type="float">
            <text:p>146</text:p>
          </table:table-cell>
          <table:table-cell office:value-type="string" calcext:value-type="string">
            <text:p>1-17</text:p>
          </table:table-cell>
          <table:table-cell office:value-type="float" office:value="17" calcext:value-type="float">
            <text:p>17</text:p>
          </table:table-cell>
          <table:table-cell office:value-type="string" calcext:value-type="string">
            <text:p>藤原道長</text:p>
          </table:table-cell>
          <table:table-cell office:value-type="string" calcext:value-type="string">
            <text:p>ふじわらのみちなが</text:p>
          </table:table-cell>
          <table:table-cell office:value-type="string" calcext:value-type="string">
            <text:p>第１弾ブースターパック</text:p>
          </table:table-cell>
          <table:table-cell table:formula="of:=VLOOKUP([.G57];[$収録番号.$A$1:$収録番号.$B$9];2;0)" office:value-type="float" office:value="15" calcext:value-type="float">
            <text:p>15</text:p>
          </table:table-cell>
          <table:table-cell office:value-type="string" calcext:value-type="string">
            <text:p>N</text:p>
          </table:table-cell>
          <table:table-cell table:formula="of:=VLOOKUP([.I57];[$レアリティ番号.$A$1:$レアリティ番号.$B$4];2;0)" office:value-type="float" office:value="1" calcext:value-type="float">
            <text:p>1</text:p>
          </table:table-cell>
          <table:table-cell office:value-type="string" calcext:value-type="string">
            <text:p>イジン</text:p>
          </table:table-cell>
          <table:table-cell table:formula="of:=VLOOKUP([.K57];[$種類番号.$A$1:$種類番号.$B$4];2;0)" office:value-type="float" office:value="1" calcext:value-type="float">
            <text:p>1</text:p>
          </table:table-cell>
          <table:table-cell office:value-type="string" calcext:value-type="string">
            <text:p>赤</text:p>
          </table:table-cell>
          <table:table-cell table:formula="of:=VLOOKUP([.M57];[$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5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57];[$特性番号.$A$1:$特性番号.$B$8];2;0);0)" office:value-type="float" office:value="0" calcext:value-type="float">
            <text:p>0</text:p>
          </table:table-cell>
          <table:table-cell office:value-type="string" calcext:value-type="string">
            <text:p>戦場に置かれたとき、自分の魔力ゾーンのマリョク1色につき、自分の墓地のマホウ1つを手札に戻す。</text:p>
          </table:table-cell>
          <table:table-cell table:style-name="ce8" table:formula="of:=NA()" office:value-type="string" office:string-value="" calcext:value-type="error">
            <text:p>#N/A</text:p>
          </table:table-cell>
          <table:table-cell table:formula="of:=IFERROR(VLOOKUP([.$V57];[$遺業能力番号.$A$1:$遺業能力番号.$B$9];2;0);0)" office:value-type="float" office:value="0" calcext:value-type="float">
            <text:p>0</text:p>
          </table:table-cell>
          <table:table-cell office:value-type="string" calcext:value-type="string">
            <text:p>https://one-draw.jp/ijinden/cardlist/001/card/01_017.png</text:p>
          </table:table-cell>
          <table:table-cell table:formula="of:=CONCATENATE([$JSON.$A$1];[.$C57];[$JSON.$B$1];[.$E57];[$JSON.$C$1];[.$F57];[$JSON.$D$1];IF(ISNA([.$S57]);&quot;null&quot;;&quot;&quot;&quot;&quot;&amp;[.$S57]&amp;&quot;&quot;&quot;&quot;);[$JSON.$E$1];[.$U57];[$JSON.$F$1];IF(ISNA([.$V57]);&quot;null&quot;;&quot;&quot;&quot;&quot;&amp;[.$V57]&amp;&quot;&quot;&quot;&quot;);[$JSON.$G$1];[.$X57];[$JSON.$H$1];[.$H57];[$JSON.$I$1];[.J57];[$JSON.$J$1];[.$L57];[$JSON.$K$1];[.$O57];[$JSON.$L$1];[.$N57];[$JSON.$M$1];[.$R57];[$JSON.$N$1];[.$T57];[$JSON.$O$1];[.$W57];[$JSON.$P$1];[.$A57];[$JSON.$Q$1];[.$B57];[$JSON.$R$1])" office:value-type="string" office:string-value="{&quot;id&quot;:&quot;1-17&quot;,&quot;name&quot;:&quot;藤原道長&quot;,&quot;kana&quot;:&quot;ふじわらのみちなが&quot;,&quot;traitText&quot;:null,&quot;ruleText&quot;:&quot;戦場に置かれたとき、自分の魔力ゾーンのマリョク1色につき、自分の墓地のマホウ1つを手札に戻す。&quot;,&quot;legacyText&quot;:null,&quot;imageUrl&quot;:&quot;https://one-draw.jp/ijinden/cardlist/001/card/01_017.png&quot;,&quot;expansion&quot;:15,&quot;rarity&quot;:1,&quot;type&quot;:1,&quot;level&quot;:5,&quot;color&quot;:1,&quot;term&quot;:0,&quot;trait&quot;:0,&quot;legacy&quot;:0,&quot;orderTable&quot;:56,&quot;orderDeck&quot;:146}," calcext:value-type="string">
            <text:p>{"id":"1-17","name":"藤原道長","kana":"ふじわらのみちなが","traitText":null,"ruleText":"戦場に置かれたとき、自分の魔力ゾーンのマリョク1色につき、自分の墓地のマホウ1つを手札に戻す。","legacyText":null,"imageUrl":"https://one-draw.jp/ijinden/cardlist/001/card/01_017.png","expansion":15,"rarity":1,"type":1,"level":5,"color":1,"term":0,"trait":0,"legacy":0,"orderTable":56,"orderDeck":146},</text:p>
          </table:table-cell>
          <table:table-cell table:number-columns-repeated="16347"/>
        </table:table-row>
        <table:table-row table:style-name="ro2">
          <table:table-cell office:value-type="float" office:value="57" calcext:value-type="float">
            <text:p>57</text:p>
          </table:table-cell>
          <table:table-cell office:value-type="float" office:value="147" calcext:value-type="float">
            <text:p>147</text:p>
          </table:table-cell>
          <table:table-cell office:value-type="string" calcext:value-type="string">
            <text:p>1-18</text:p>
          </table:table-cell>
          <table:table-cell office:value-type="float" office:value="18" calcext:value-type="float">
            <text:p>18</text:p>
          </table:table-cell>
          <table:table-cell office:value-type="string" calcext:value-type="string">
            <text:p>源頼朝</text:p>
          </table:table-cell>
          <table:table-cell office:value-type="string" calcext:value-type="string">
            <text:p>みなもとのよりとも</text:p>
          </table:table-cell>
          <table:table-cell office:value-type="string" calcext:value-type="string">
            <text:p>第１弾ブースターパック</text:p>
          </table:table-cell>
          <table:table-cell table:formula="of:=VLOOKUP([.G58];[$収録番号.$A$1:$収録番号.$B$9];2;0)" office:value-type="float" office:value="15" calcext:value-type="float">
            <text:p>15</text:p>
          </table:table-cell>
          <table:table-cell office:value-type="string" calcext:value-type="string">
            <text:p>N</text:p>
          </table:table-cell>
          <table:table-cell table:formula="of:=VLOOKUP([.I58];[$レアリティ番号.$A$1:$レアリティ番号.$B$4];2;0)" office:value-type="float" office:value="1" calcext:value-type="float">
            <text:p>1</text:p>
          </table:table-cell>
          <table:table-cell office:value-type="string" calcext:value-type="string">
            <text:p>イジン</text:p>
          </table:table-cell>
          <table:table-cell table:formula="of:=VLOOKUP([.K58];[$種類番号.$A$1:$種類番号.$B$4];2;0)" office:value-type="float" office:value="1" calcext:value-type="float">
            <text:p>1</text:p>
          </table:table-cell>
          <table:table-cell office:value-type="string" calcext:value-type="string">
            <text:p>赤</text:p>
          </table:table-cell>
          <table:table-cell table:formula="of:=VLOOKUP([.M58];[$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5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58];[$特性番号.$A$1:$特性番号.$B$8];2;0);0)" office:value-type="float" office:value="0" calcext:value-type="float">
            <text:p>0</text:p>
          </table:table-cell>
          <table:table-cell office:value-type="string" calcext:value-type="string">
            <text:p>戦場に置かれたとき、パワー4000以下の相手の戦場のイジン1体を破壊する。</text:p>
          </table:table-cell>
          <table:table-cell table:style-name="ce8" table:formula="of:=NA()" office:value-type="string" office:string-value="" calcext:value-type="error">
            <text:p>#N/A</text:p>
          </table:table-cell>
          <table:table-cell table:formula="of:=IFERROR(VLOOKUP([.$V58];[$遺業能力番号.$A$1:$遺業能力番号.$B$9];2;0);0)" office:value-type="float" office:value="0" calcext:value-type="float">
            <text:p>0</text:p>
          </table:table-cell>
          <table:table-cell office:value-type="string" calcext:value-type="string">
            <text:p>https://one-draw.jp/ijinden/cardlist/001/card/01_018.png</text:p>
          </table:table-cell>
          <table:table-cell table:formula="of:=CONCATENATE([$JSON.$A$1];[.$C58];[$JSON.$B$1];[.$E58];[$JSON.$C$1];[.$F58];[$JSON.$D$1];IF(ISNA([.$S58]);&quot;null&quot;;&quot;&quot;&quot;&quot;&amp;[.$S58]&amp;&quot;&quot;&quot;&quot;);[$JSON.$E$1];[.$U58];[$JSON.$F$1];IF(ISNA([.$V58]);&quot;null&quot;;&quot;&quot;&quot;&quot;&amp;[.$V58]&amp;&quot;&quot;&quot;&quot;);[$JSON.$G$1];[.$X58];[$JSON.$H$1];[.$H58];[$JSON.$I$1];[.J58];[$JSON.$J$1];[.$L58];[$JSON.$K$1];[.$O58];[$JSON.$L$1];[.$N58];[$JSON.$M$1];[.$R58];[$JSON.$N$1];[.$T58];[$JSON.$O$1];[.$W58];[$JSON.$P$1];[.$A58];[$JSON.$Q$1];[.$B58];[$JSON.$R$1])" office:value-type="string" office:string-value="{&quot;id&quot;:&quot;1-18&quot;,&quot;name&quot;:&quot;源頼朝&quot;,&quot;kana&quot;:&quot;みなもとのよりとも&quot;,&quot;traitText&quot;:null,&quot;ruleText&quot;:&quot;戦場に置かれたとき、パワー4000以下の相手の戦場のイジン1体を破壊する。&quot;,&quot;legacyText&quot;:null,&quot;imageUrl&quot;:&quot;https://one-draw.jp/ijinden/cardlist/001/card/01_018.png&quot;,&quot;expansion&quot;:15,&quot;rarity&quot;:1,&quot;type&quot;:1,&quot;level&quot;:5,&quot;color&quot;:1,&quot;term&quot;:0,&quot;trait&quot;:0,&quot;legacy&quot;:0,&quot;orderTable&quot;:57,&quot;orderDeck&quot;:147}," calcext:value-type="string">
            <text:p>{"id":"1-18","name":"源頼朝","kana":"みなもとのよりとも","traitText":null,"ruleText":"戦場に置かれたとき、パワー4000以下の相手の戦場のイジン1体を破壊する。","legacyText":null,"imageUrl":"https://one-draw.jp/ijinden/cardlist/001/card/01_018.png","expansion":15,"rarity":1,"type":1,"level":5,"color":1,"term":0,"trait":0,"legacy":0,"orderTable":57,"orderDeck":147},</text:p>
          </table:table-cell>
          <table:table-cell table:number-columns-repeated="16347"/>
        </table:table-row>
        <table:table-row table:style-name="ro2">
          <table:table-cell office:value-type="float" office:value="58" calcext:value-type="float">
            <text:p>58</text:p>
          </table:table-cell>
          <table:table-cell office:value-type="float" office:value="203" calcext:value-type="float">
            <text:p>203</text:p>
          </table:table-cell>
          <table:table-cell office:value-type="string" calcext:value-type="string">
            <text:p>1-19</text:p>
          </table:table-cell>
          <table:table-cell office:value-type="float" office:value="19" calcext:value-type="float">
            <text:p>19</text:p>
          </table:table-cell>
          <table:table-cell office:value-type="string" calcext:value-type="string">
            <text:p>ガイウス・ユリウス・カエサル</text:p>
          </table:table-cell>
          <table:table-cell office:value-type="string" calcext:value-type="string">
            <text:p>がいうすゆりうすかえさる</text:p>
          </table:table-cell>
          <table:table-cell office:value-type="string" calcext:value-type="string">
            <text:p>第１弾ブースターパック</text:p>
          </table:table-cell>
          <table:table-cell table:formula="of:=VLOOKUP([.G59];[$収録番号.$A$1:$収録番号.$B$9];2;0)" office:value-type="float" office:value="15" calcext:value-type="float">
            <text:p>15</text:p>
          </table:table-cell>
          <table:table-cell office:value-type="string" calcext:value-type="string">
            <text:p>R</text:p>
          </table:table-cell>
          <table:table-cell table:formula="of:=VLOOKUP([.I59];[$レアリティ番号.$A$1:$レアリティ番号.$B$4];2;0)" office:value-type="float" office:value="2" calcext:value-type="float">
            <text:p>2</text:p>
          </table:table-cell>
          <table:table-cell office:value-type="string" calcext:value-type="string">
            <text:p>イジン</text:p>
          </table:table-cell>
          <table:table-cell table:formula="of:=VLOOKUP([.K59];[$種類番号.$A$1:$種類番号.$B$4];2;0)" office:value-type="float" office:value="1" calcext:value-type="float">
            <text:p>1</text:p>
          </table:table-cell>
          <table:table-cell office:value-type="string" calcext:value-type="string">
            <text:p>赤</text:p>
          </table:table-cell>
          <table:table-cell table:formula="of:=VLOOKUP([.M59];[$色番号.$A$1:$色番号.$B$10];2;0)" office:value-type="float" office:value="1" calcext:value-type="float">
            <text:p>1</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5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59];[$特性番号.$A$1:$特性番号.$B$8];2;0);0)" office:value-type="float" office:value="0" calcext:value-type="float">
            <text:p>0</text:p>
          </table:table-cell>
          <table:table-cell office:value-type="string" calcext:value-type="string">
            <text:p>トリプルプレッシャー¶戦場に置かれたとき、相手の手札が6枚以上なら発動する。このターンの間「即応」を得る。</text:p>
          </table:table-cell>
          <table:table-cell table:style-name="ce8" table:formula="of:=NA()" office:value-type="string" office:string-value="" calcext:value-type="error">
            <text:p>#N/A</text:p>
          </table:table-cell>
          <table:table-cell table:formula="of:=IFERROR(VLOOKUP([.$V59];[$遺業能力番号.$A$1:$遺業能力番号.$B$9];2;0);0)" office:value-type="float" office:value="0" calcext:value-type="float">
            <text:p>0</text:p>
          </table:table-cell>
          <table:table-cell office:value-type="string" calcext:value-type="string">
            <text:p>https://one-draw.jp/ijinden/cardlist/001/card/01_019.png</text:p>
          </table:table-cell>
          <table:table-cell table:formula="of:=CONCATENATE([$JSON.$A$1];[.$C59];[$JSON.$B$1];[.$E59];[$JSON.$C$1];[.$F59];[$JSON.$D$1];IF(ISNA([.$S59]);&quot;null&quot;;&quot;&quot;&quot;&quot;&amp;[.$S59]&amp;&quot;&quot;&quot;&quot;);[$JSON.$E$1];[.$U59];[$JSON.$F$1];IF(ISNA([.$V59]);&quot;null&quot;;&quot;&quot;&quot;&quot;&amp;[.$V59]&amp;&quot;&quot;&quot;&quot;);[$JSON.$G$1];[.$X59];[$JSON.$H$1];[.$H59];[$JSON.$I$1];[.J59];[$JSON.$J$1];[.$L59];[$JSON.$K$1];[.$O59];[$JSON.$L$1];[.$N59];[$JSON.$M$1];[.$R59];[$JSON.$N$1];[.$T59];[$JSON.$O$1];[.$W59];[$JSON.$P$1];[.$A59];[$JSON.$Q$1];[.$B59];[$JSON.$R$1])" office:value-type="string" office:string-value="{&quot;id&quot;:&quot;1-19&quot;,&quot;name&quot;:&quot;ガイウス・ユリウス・カエサル&quot;,&quot;kana&quot;:&quot;がいうすゆりうすかえさる&quot;,&quot;traitText&quot;:null,&quot;ruleText&quot;:&quot;トリプルプレッシャー¶戦場に置かれたとき、相手の手札が6枚以上なら発動する。このターンの間「即応」を得る。&quot;,&quot;legacyText&quot;:null,&quot;imageUrl&quot;:&quot;https://one-draw.jp/ijinden/cardlist/001/card/01_019.png&quot;,&quot;expansion&quot;:15,&quot;rarity&quot;:2,&quot;type&quot;:1,&quot;level&quot;:7,&quot;color&quot;:1,&quot;term&quot;:0,&quot;trait&quot;:0,&quot;legacy&quot;:0,&quot;orderTable&quot;:58,&quot;orderDeck&quot;:203}," calcext:value-type="string">
            <text:p>{"id":"1-19","name":"ガイウス・ユリウス・カエサル","kana":"がいうすゆりうすかえさる","traitText":null,"ruleText":"トリプルプレッシャー¶戦場に置かれたとき、相手の手札が6枚以上なら発動する。このターンの間「即応」を得る。","legacyText":null,"imageUrl":"https://one-draw.jp/ijinden/cardlist/001/card/01_019.png","expansion":15,"rarity":2,"type":1,"level":7,"color":1,"term":0,"trait":0,"legacy":0,"orderTable":58,"orderDeck":203},</text:p>
          </table:table-cell>
          <table:table-cell table:number-columns-repeated="16347"/>
        </table:table-row>
        <table:table-row table:style-name="ro2">
          <table:table-cell office:value-type="float" office:value="59" calcext:value-type="float">
            <text:p>59</text:p>
          </table:table-cell>
          <table:table-cell office:value-type="float" office:value="7" calcext:value-type="float">
            <text:p>7</text:p>
          </table:table-cell>
          <table:table-cell office:value-type="string" calcext:value-type="string">
            <text:p>1-20</text:p>
          </table:table-cell>
          <table:table-cell office:value-type="float" office:value="20" calcext:value-type="float">
            <text:p>20</text:p>
          </table:table-cell>
          <table:table-cell office:value-type="string" calcext:value-type="string">
            <text:p>ハンス・アクセル・フォン・フェルセン</text:p>
          </table:table-cell>
          <table:table-cell office:value-type="string" calcext:value-type="string">
            <text:p>はんすあくせるふぉんふぇるせん</text:p>
          </table:table-cell>
          <table:table-cell office:value-type="string" calcext:value-type="string">
            <text:p>第１弾ブースターパック</text:p>
          </table:table-cell>
          <table:table-cell table:formula="of:=VLOOKUP([.G60];[$収録番号.$A$1:$収録番号.$B$9];2;0)" office:value-type="float" office:value="15" calcext:value-type="float">
            <text:p>15</text:p>
          </table:table-cell>
          <table:table-cell office:value-type="string" calcext:value-type="string">
            <text:p>N</text:p>
          </table:table-cell>
          <table:table-cell table:formula="of:=VLOOKUP([.I60];[$レアリティ番号.$A$1:$レアリティ番号.$B$4];2;0)" office:value-type="float" office:value="1" calcext:value-type="float">
            <text:p>1</text:p>
          </table:table-cell>
          <table:table-cell office:value-type="string" calcext:value-type="string">
            <text:p>イジン</text:p>
          </table:table-cell>
          <table:table-cell table:formula="of:=VLOOKUP([.K60];[$種類番号.$A$1:$種類番号.$B$4];2;0)" office:value-type="float" office:value="1" calcext:value-type="float">
            <text:p>1</text:p>
          </table:table-cell>
          <table:table-cell office:value-type="string" calcext:value-type="string">
            <text:p>青</text:p>
          </table:table-cell>
          <table:table-cell table:formula="of:=VLOOKUP([.M60];[$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6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60];[$特性番号.$A$1:$特性番号.$B$8];2;0);0)" office:value-type="float" office:value="0" calcext:value-type="float">
            <text:p>0</text:p>
          </table:table-cell>
          <table:table-cell office:value-type="string" calcext:value-type="string">
            <text:p>ブロッカーになったとき、1ドローする。¶相手の戦場の「即応」を持つイジンがアタッカーになったとき、これを起こす。</text:p>
          </table:table-cell>
          <table:table-cell table:style-name="ce8" office:value-type="string" calcext:value-type="string">
            <text:p>1ドローする</text:p>
          </table:table-cell>
          <table:table-cell table:formula="of:=IFERROR(VLOOKUP([.$V60];[$遺業能力番号.$A$1:$遺業能力番号.$B$9];2;0);0)" office:value-type="float" office:value="4" calcext:value-type="float">
            <text:p>4</text:p>
          </table:table-cell>
          <table:table-cell office:value-type="string" calcext:value-type="string">
            <text:p>https://one-draw.jp/ijinden/cardlist/001/card/01_020.png</text:p>
          </table:table-cell>
          <table:table-cell table:formula="of:=CONCATENATE([$JSON.$A$1];[.$C60];[$JSON.$B$1];[.$E60];[$JSON.$C$1];[.$F60];[$JSON.$D$1];IF(ISNA([.$S60]);&quot;null&quot;;&quot;&quot;&quot;&quot;&amp;[.$S60]&amp;&quot;&quot;&quot;&quot;);[$JSON.$E$1];[.$U60];[$JSON.$F$1];IF(ISNA([.$V60]);&quot;null&quot;;&quot;&quot;&quot;&quot;&amp;[.$V60]&amp;&quot;&quot;&quot;&quot;);[$JSON.$G$1];[.$X60];[$JSON.$H$1];[.$H60];[$JSON.$I$1];[.J60];[$JSON.$J$1];[.$L60];[$JSON.$K$1];[.$O60];[$JSON.$L$1];[.$N60];[$JSON.$M$1];[.$R60];[$JSON.$N$1];[.$T60];[$JSON.$O$1];[.$W60];[$JSON.$P$1];[.$A60];[$JSON.$Q$1];[.$B60];[$JSON.$R$1])" office:value-type="string" office:string-value="{&quot;id&quot;:&quot;1-20&quot;,&quot;name&quot;:&quot;ハンス・アクセル・フォン・フェルセン&quot;,&quot;kana&quot;:&quot;はんすあくせるふぉんふぇるせん&quot;,&quot;traitText&quot;:null,&quot;ruleText&quot;:&quot;ブロッカーになったとき、1ドローする。¶相手の戦場の「即応」を持つイジンがアタッカーになったとき、これを起こす。&quot;,&quot;legacyText&quot;:&quot;1ドローする&quot;,&quot;imageUrl&quot;:&quot;https://one-draw.jp/ijinden/cardlist/001/card/01_020.png&quot;,&quot;expansion&quot;:15,&quot;rarity&quot;:1,&quot;type&quot;:1,&quot;level&quot;:1,&quot;color&quot;:2,&quot;term&quot;:0,&quot;trait&quot;:0,&quot;legacy&quot;:4,&quot;orderTable&quot;:59,&quot;orderDeck&quot;:7}," calcext:value-type="string">
            <text:p>{"id":"1-20","name":"ハンス・アクセル・フォン・フェルセン","kana":"はんすあくせるふぉんふぇるせん","traitText":null,"ruleText":"ブロッカーになったとき、1ドローする。¶相手の戦場の「即応」を持つイジンがアタッカーになったとき、これを起こす。","legacyText":"1ドローする","imageUrl":"https://one-draw.jp/ijinden/cardlist/001/card/01_020.png","expansion":15,"rarity":1,"type":1,"level":1,"color":2,"term":0,"trait":0,"legacy":4,"orderTable":59,"orderDeck":7},</text:p>
          </table:table-cell>
          <table:table-cell table:number-columns-repeated="16347"/>
        </table:table-row>
        <table:table-row table:style-name="ro2">
          <table:table-cell office:value-type="float" office:value="60" calcext:value-type="float">
            <text:p>60</text:p>
          </table:table-cell>
          <table:table-cell office:value-type="float" office:value="34" calcext:value-type="float">
            <text:p>34</text:p>
          </table:table-cell>
          <table:table-cell office:value-type="string" calcext:value-type="string">
            <text:p>1-21</text:p>
          </table:table-cell>
          <table:table-cell office:value-type="float" office:value="21" calcext:value-type="float">
            <text:p>21</text:p>
          </table:table-cell>
          <table:table-cell office:value-type="string" calcext:value-type="string">
            <text:p>鑑真</text:p>
          </table:table-cell>
          <table:table-cell office:value-type="string" calcext:value-type="string">
            <text:p>がんじん</text:p>
          </table:table-cell>
          <table:table-cell office:value-type="string" calcext:value-type="string">
            <text:p>第１弾ブースターパック</text:p>
          </table:table-cell>
          <table:table-cell table:formula="of:=VLOOKUP([.G61];[$収録番号.$A$1:$収録番号.$B$9];2;0)" office:value-type="float" office:value="15" calcext:value-type="float">
            <text:p>15</text:p>
          </table:table-cell>
          <table:table-cell office:value-type="string" calcext:value-type="string">
            <text:p>N</text:p>
          </table:table-cell>
          <table:table-cell table:formula="of:=VLOOKUP([.I61];[$レアリティ番号.$A$1:$レアリティ番号.$B$4];2;0)" office:value-type="float" office:value="1" calcext:value-type="float">
            <text:p>1</text:p>
          </table:table-cell>
          <table:table-cell office:value-type="string" calcext:value-type="string">
            <text:p>イジン</text:p>
          </table:table-cell>
          <table:table-cell table:formula="of:=VLOOKUP([.K61];[$種類番号.$A$1:$種類番号.$B$4];2;0)" office:value-type="float" office:value="1" calcext:value-type="float">
            <text:p>1</text:p>
          </table:table-cell>
          <table:table-cell office:value-type="string" calcext:value-type="string">
            <text:p>青</text:p>
          </table:table-cell>
          <table:table-cell table:formula="of:=VLOOKUP([.M61];[$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航海</text:p>
          </table:table-cell>
          <table:table-cell table:formula="of:=IFERROR(VLOOKUP([.$Q61];[$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61];[$特性番号.$A$1:$特性番号.$B$8];2;0);0)" office:value-type="float" office:value="0" calcext:value-type="float">
            <text:p>0</text:p>
          </table:table-cell>
          <table:table-cell office:value-type="string" calcext:value-type="string">
            <text:p>航海 - アタッカーになったとき、1ドローして、これを破壊する。</text:p>
          </table:table-cell>
          <table:table-cell table:style-name="ce8" office:value-type="string" calcext:value-type="string">
            <text:p>1ドローする</text:p>
          </table:table-cell>
          <table:table-cell table:formula="of:=IFERROR(VLOOKUP([.$V61];[$遺業能力番号.$A$1:$遺業能力番号.$B$9];2;0);0)" office:value-type="float" office:value="4" calcext:value-type="float">
            <text:p>4</text:p>
          </table:table-cell>
          <table:table-cell office:value-type="string" calcext:value-type="string">
            <text:p>https://one-draw.jp/ijinden/cardlist/001/card/01_021.png</text:p>
          </table:table-cell>
          <table:table-cell table:formula="of:=CONCATENATE([$JSON.$A$1];[.$C61];[$JSON.$B$1];[.$E61];[$JSON.$C$1];[.$F61];[$JSON.$D$1];IF(ISNA([.$S61]);&quot;null&quot;;&quot;&quot;&quot;&quot;&amp;[.$S61]&amp;&quot;&quot;&quot;&quot;);[$JSON.$E$1];[.$U61];[$JSON.$F$1];IF(ISNA([.$V61]);&quot;null&quot;;&quot;&quot;&quot;&quot;&amp;[.$V61]&amp;&quot;&quot;&quot;&quot;);[$JSON.$G$1];[.$X61];[$JSON.$H$1];[.$H61];[$JSON.$I$1];[.J61];[$JSON.$J$1];[.$L61];[$JSON.$K$1];[.$O61];[$JSON.$L$1];[.$N61];[$JSON.$M$1];[.$R61];[$JSON.$N$1];[.$T61];[$JSON.$O$1];[.$W61];[$JSON.$P$1];[.$A61];[$JSON.$Q$1];[.$B61];[$JSON.$R$1])" office:value-type="string" office:string-value="{&quot;id&quot;:&quot;1-21&quot;,&quot;name&quot;:&quot;鑑真&quot;,&quot;kana&quot;:&quot;がんじん&quot;,&quot;traitText&quot;:null,&quot;ruleText&quot;:&quot;航海 - アタッカーになったとき、1ドローして、これを破壊する。&quot;,&quot;legacyText&quot;:&quot;1ドローする&quot;,&quot;imageUrl&quot;:&quot;https://one-draw.jp/ijinden/cardlist/001/card/01_021.png&quot;,&quot;expansion&quot;:15,&quot;rarity&quot;:1,&quot;type&quot;:1,&quot;level&quot;:2,&quot;color&quot;:2,&quot;term&quot;:1,&quot;trait&quot;:0,&quot;legacy&quot;:4,&quot;orderTable&quot;:60,&quot;orderDeck&quot;:34}," calcext:value-type="string">
            <text:p>{"id":"1-21","name":"鑑真","kana":"がんじん","traitText":null,"ruleText":"航海 - アタッカーになったとき、1ドローして、これを破壊する。","legacyText":"1ドローする","imageUrl":"https://one-draw.jp/ijinden/cardlist/001/card/01_021.png","expansion":15,"rarity":1,"type":1,"level":2,"color":2,"term":1,"trait":0,"legacy":4,"orderTable":60,"orderDeck":34},</text:p>
          </table:table-cell>
          <table:table-cell table:number-columns-repeated="16347"/>
        </table:table-row>
        <table:table-row table:style-name="ro2">
          <table:table-cell office:value-type="float" office:value="61" calcext:value-type="float">
            <text:p>61</text:p>
          </table:table-cell>
          <table:table-cell office:value-type="float" office:value="35" calcext:value-type="float">
            <text:p>35</text:p>
          </table:table-cell>
          <table:table-cell office:value-type="string" calcext:value-type="string">
            <text:p>1-22</text:p>
          </table:table-cell>
          <table:table-cell office:value-type="float" office:value="22" calcext:value-type="float">
            <text:p>22</text:p>
          </table:table-cell>
          <table:table-cell office:value-type="string" calcext:value-type="string">
            <text:p>ジャンヌ・ダルク</text:p>
          </table:table-cell>
          <table:table-cell office:value-type="string" calcext:value-type="string">
            <text:p>じゃんぬだるく</text:p>
          </table:table-cell>
          <table:table-cell office:value-type="string" calcext:value-type="string">
            <text:p>第１弾ブースターパック</text:p>
          </table:table-cell>
          <table:table-cell table:formula="of:=VLOOKUP([.G62];[$収録番号.$A$1:$収録番号.$B$9];2;0)" office:value-type="float" office:value="15" calcext:value-type="float">
            <text:p>15</text:p>
          </table:table-cell>
          <table:table-cell office:value-type="string" calcext:value-type="string">
            <text:p>N</text:p>
          </table:table-cell>
          <table:table-cell table:formula="of:=VLOOKUP([.I62];[$レアリティ番号.$A$1:$レアリティ番号.$B$4];2;0)" office:value-type="float" office:value="1" calcext:value-type="float">
            <text:p>1</text:p>
          </table:table-cell>
          <table:table-cell office:value-type="string" calcext:value-type="string">
            <text:p>イジン</text:p>
          </table:table-cell>
          <table:table-cell table:formula="of:=VLOOKUP([.K62];[$種類番号.$A$1:$種類番号.$B$4];2;0)" office:value-type="float" office:value="1" calcext:value-type="float">
            <text:p>1</text:p>
          </table:table-cell>
          <table:table-cell office:value-type="string" calcext:value-type="string">
            <text:p>青</text:p>
          </table:table-cell>
          <table:table-cell table:formula="of:=VLOOKUP([.M62];[$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6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62];[$特性番号.$A$1:$特性番号.$B$8];2;0);0)" office:value-type="float" office:value="0" calcext:value-type="float">
            <text:p>0</text:p>
          </table:table-cell>
          <table:table-cell office:value-type="string" calcext:value-type="string">
            <text:p>戦場に置かれたとき、自分の山札の上から3枚を墓地に置く。¶破壊されたとき、自分の手札1枚を墓地に置く。</text:p>
          </table:table-cell>
          <table:table-cell table:style-name="ce8" office:value-type="string" calcext:value-type="string">
            <text:p>魔力化</text:p>
          </table:table-cell>
          <table:table-cell table:formula="of:=IFERROR(VLOOKUP([.$V62];[$遺業能力番号.$A$1:$遺業能力番号.$B$9];2;0);0)" office:value-type="float" office:value="1" calcext:value-type="float">
            <text:p>1</text:p>
          </table:table-cell>
          <table:table-cell office:value-type="string" calcext:value-type="string">
            <text:p>https://one-draw.jp/ijinden/cardlist/001/card/01_022.png</text:p>
          </table:table-cell>
          <table:table-cell table:formula="of:=CONCATENATE([$JSON.$A$1];[.$C62];[$JSON.$B$1];[.$E62];[$JSON.$C$1];[.$F62];[$JSON.$D$1];IF(ISNA([.$S62]);&quot;null&quot;;&quot;&quot;&quot;&quot;&amp;[.$S62]&amp;&quot;&quot;&quot;&quot;);[$JSON.$E$1];[.$U62];[$JSON.$F$1];IF(ISNA([.$V62]);&quot;null&quot;;&quot;&quot;&quot;&quot;&amp;[.$V62]&amp;&quot;&quot;&quot;&quot;);[$JSON.$G$1];[.$X62];[$JSON.$H$1];[.$H62];[$JSON.$I$1];[.J62];[$JSON.$J$1];[.$L62];[$JSON.$K$1];[.$O62];[$JSON.$L$1];[.$N62];[$JSON.$M$1];[.$R62];[$JSON.$N$1];[.$T62];[$JSON.$O$1];[.$W62];[$JSON.$P$1];[.$A62];[$JSON.$Q$1];[.$B62];[$JSON.$R$1])" office:value-type="string" office:string-value="{&quot;id&quot;:&quot;1-22&quot;,&quot;name&quot;:&quot;ジャンヌ・ダルク&quot;,&quot;kana&quot;:&quot;じゃんぬだるく&quot;,&quot;traitText&quot;:null,&quot;ruleText&quot;:&quot;戦場に置かれたとき、自分の山札の上から3枚を墓地に置く。¶破壊されたとき、自分の手札1枚を墓地に置く。&quot;,&quot;legacyText&quot;:&quot;魔力化&quot;,&quot;imageUrl&quot;:&quot;https://one-draw.jp/ijinden/cardlist/001/card/01_022.png&quot;,&quot;expansion&quot;:15,&quot;rarity&quot;:1,&quot;type&quot;:1,&quot;level&quot;:2,&quot;color&quot;:2,&quot;term&quot;:0,&quot;trait&quot;:0,&quot;legacy&quot;:1,&quot;orderTable&quot;:61,&quot;orderDeck&quot;:35}," calcext:value-type="string">
            <text:p>{"id":"1-22","name":"ジャンヌ・ダルク","kana":"じゃんぬだるく","traitText":null,"ruleText":"戦場に置かれたとき、自分の山札の上から3枚を墓地に置く。¶破壊されたとき、自分の手札1枚を墓地に置く。","legacyText":"魔力化","imageUrl":"https://one-draw.jp/ijinden/cardlist/001/card/01_022.png","expansion":15,"rarity":1,"type":1,"level":2,"color":2,"term":0,"trait":0,"legacy":1,"orderTable":61,"orderDeck":35},</text:p>
          </table:table-cell>
          <table:table-cell table:number-columns-repeated="16347"/>
        </table:table-row>
        <table:table-row table:style-name="ro2">
          <table:table-cell office:value-type="float" office:value="62" calcext:value-type="float">
            <text:p>62</text:p>
          </table:table-cell>
          <table:table-cell office:value-type="float" office:value="36" calcext:value-type="float">
            <text:p>36</text:p>
          </table:table-cell>
          <table:table-cell office:value-type="string" calcext:value-type="string">
            <text:p>1-23</text:p>
          </table:table-cell>
          <table:table-cell office:value-type="float" office:value="23" calcext:value-type="float">
            <text:p>23</text:p>
          </table:table-cell>
          <table:table-cell office:value-type="string" calcext:value-type="string">
            <text:p>ドナテッロ</text:p>
          </table:table-cell>
          <table:table-cell office:value-type="string" calcext:value-type="string">
            <text:p>どなてっろ</text:p>
          </table:table-cell>
          <table:table-cell office:value-type="string" calcext:value-type="string">
            <text:p>第１弾ブースターパック</text:p>
          </table:table-cell>
          <table:table-cell table:formula="of:=VLOOKUP([.G63];[$収録番号.$A$1:$収録番号.$B$9];2;0)" office:value-type="float" office:value="15" calcext:value-type="float">
            <text:p>15</text:p>
          </table:table-cell>
          <table:table-cell office:value-type="string" calcext:value-type="string">
            <text:p>N</text:p>
          </table:table-cell>
          <table:table-cell table:formula="of:=VLOOKUP([.I63];[$レアリティ番号.$A$1:$レアリティ番号.$B$4];2;0)" office:value-type="float" office:value="1" calcext:value-type="float">
            <text:p>1</text:p>
          </table:table-cell>
          <table:table-cell office:value-type="string" calcext:value-type="string">
            <text:p>イジン</text:p>
          </table:table-cell>
          <table:table-cell table:formula="of:=VLOOKUP([.K63];[$種類番号.$A$1:$種類番号.$B$4];2;0)" office:value-type="float" office:value="1" calcext:value-type="float">
            <text:p>1</text:p>
          </table:table-cell>
          <table:table-cell office:value-type="string" calcext:value-type="string">
            <text:p>青</text:p>
          </table:table-cell>
          <table:table-cell table:formula="of:=VLOOKUP([.M63];[$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63];[$能力語番号.$A$1:$能力語番号.$B$10];2;0);0)" office:value-type="float" office:value="0" calcext:value-type="float">
            <text:p>0</text:p>
          </table:table-cell>
          <table:table-cell office:value-type="string" calcext:value-type="string">
            <text:p>美術</text:p>
          </table:table-cell>
          <table:table-cell table:formula="of:=IFERROR(VLOOKUP([.$S63];[$特性番号.$A$1:$特性番号.$B$8];2;0);0)" office:value-type="float" office:value="2" calcext:value-type="float">
            <text:p>2</text:p>
          </table:table-cell>
          <table:table-cell office:value-type="string" calcext:value-type="string">
            <text:p>戦場に置かれたとき、1ドローして、自分の手札1枚を墓地に置く。</text:p>
          </table:table-cell>
          <table:table-cell table:style-name="ce8" office:value-type="string" calcext:value-type="string">
            <text:p>1ドローする</text:p>
          </table:table-cell>
          <table:table-cell table:formula="of:=IFERROR(VLOOKUP([.$V63];[$遺業能力番号.$A$1:$遺業能力番号.$B$9];2;0);0)" office:value-type="float" office:value="4" calcext:value-type="float">
            <text:p>4</text:p>
          </table:table-cell>
          <table:table-cell office:value-type="string" calcext:value-type="string">
            <text:p>https://one-draw.jp/ijinden/cardlist/001/card/01_023.png</text:p>
          </table:table-cell>
          <table:table-cell table:formula="of:=CONCATENATE([$JSON.$A$1];[.$C63];[$JSON.$B$1];[.$E63];[$JSON.$C$1];[.$F63];[$JSON.$D$1];IF(ISNA([.$S63]);&quot;null&quot;;&quot;&quot;&quot;&quot;&amp;[.$S63]&amp;&quot;&quot;&quot;&quot;);[$JSON.$E$1];[.$U63];[$JSON.$F$1];IF(ISNA([.$V63]);&quot;null&quot;;&quot;&quot;&quot;&quot;&amp;[.$V63]&amp;&quot;&quot;&quot;&quot;);[$JSON.$G$1];[.$X63];[$JSON.$H$1];[.$H63];[$JSON.$I$1];[.J63];[$JSON.$J$1];[.$L63];[$JSON.$K$1];[.$O63];[$JSON.$L$1];[.$N63];[$JSON.$M$1];[.$R63];[$JSON.$N$1];[.$T63];[$JSON.$O$1];[.$W63];[$JSON.$P$1];[.$A63];[$JSON.$Q$1];[.$B63];[$JSON.$R$1])" office:value-type="string" office:string-value="{&quot;id&quot;:&quot;1-23&quot;,&quot;name&quot;:&quot;ドナテッロ&quot;,&quot;kana&quot;:&quot;どなてっろ&quot;,&quot;traitText&quot;:&quot;美術&quot;,&quot;ruleText&quot;:&quot;戦場に置かれたとき、1ドローして、自分の手札1枚を墓地に置く。&quot;,&quot;legacyText&quot;:&quot;1ドローする&quot;,&quot;imageUrl&quot;:&quot;https://one-draw.jp/ijinden/cardlist/001/card/01_023.png&quot;,&quot;expansion&quot;:15,&quot;rarity&quot;:1,&quot;type&quot;:1,&quot;level&quot;:2,&quot;color&quot;:2,&quot;term&quot;:0,&quot;trait&quot;:2,&quot;legacy&quot;:4,&quot;orderTable&quot;:62,&quot;orderDeck&quot;:36}," calcext:value-type="string">
            <text:p>{"id":"1-23","name":"ドナテッロ","kana":"どなてっろ","traitText":"美術","ruleText":"戦場に置かれたとき、1ドローして、自分の手札1枚を墓地に置く。","legacyText":"1ドローする","imageUrl":"https://one-draw.jp/ijinden/cardlist/001/card/01_023.png","expansion":15,"rarity":1,"type":1,"level":2,"color":2,"term":0,"trait":2,"legacy":4,"orderTable":62,"orderDeck":36},</text:p>
          </table:table-cell>
          <table:table-cell table:number-columns-repeated="16347"/>
        </table:table-row>
        <table:table-row table:style-name="ro2">
          <table:table-cell office:value-type="float" office:value="63" calcext:value-type="float">
            <text:p>63</text:p>
          </table:table-cell>
          <table:table-cell office:value-type="float" office:value="78" calcext:value-type="float">
            <text:p>78</text:p>
          </table:table-cell>
          <table:table-cell office:value-type="string" calcext:value-type="string">
            <text:p>1-24</text:p>
          </table:table-cell>
          <table:table-cell office:value-type="float" office:value="24" calcext:value-type="float">
            <text:p>24</text:p>
          </table:table-cell>
          <table:table-cell office:value-type="string" calcext:value-type="string">
            <text:p>孔子</text:p>
          </table:table-cell>
          <table:table-cell office:value-type="string" calcext:value-type="string">
            <text:p>こうし</text:p>
          </table:table-cell>
          <table:table-cell office:value-type="string" calcext:value-type="string">
            <text:p>第１弾ブースターパック</text:p>
          </table:table-cell>
          <table:table-cell table:formula="of:=VLOOKUP([.G64];[$収録番号.$A$1:$収録番号.$B$9];2;0)" office:value-type="float" office:value="15" calcext:value-type="float">
            <text:p>15</text:p>
          </table:table-cell>
          <table:table-cell office:value-type="string" calcext:value-type="string">
            <text:p>R</text:p>
          </table:table-cell>
          <table:table-cell table:formula="of:=VLOOKUP([.I64];[$レアリティ番号.$A$1:$レアリティ番号.$B$4];2;0)" office:value-type="float" office:value="2" calcext:value-type="float">
            <text:p>2</text:p>
          </table:table-cell>
          <table:table-cell office:value-type="string" calcext:value-type="string">
            <text:p>イジン</text:p>
          </table:table-cell>
          <table:table-cell table:formula="of:=VLOOKUP([.K64];[$種類番号.$A$1:$種類番号.$B$4];2;0)" office:value-type="float" office:value="1" calcext:value-type="float">
            <text:p>1</text:p>
          </table:table-cell>
          <table:table-cell office:value-type="string" calcext:value-type="string">
            <text:p>青</text:p>
          </table:table-cell>
          <table:table-cell table:formula="of:=VLOOKUP([.M64];[$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6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64];[$特性番号.$A$1:$特性番号.$B$8];2;0);0)" office:value-type="float" office:value="0" calcext:value-type="float">
            <text:p>0</text:p>
          </table:table-cell>
          <table:table-cell office:value-type="string" calcext:value-type="string">
            <text:p>ガーディアンが自分の戦場に置かれるたび、相手の戦場のガーディアン1体を寝かせる。¶これが戦場にいる間、自分の戦場のイジンは「ブロック+1000」を得る。</text:p>
          </table:table-cell>
          <table:table-cell table:style-name="ce8" office:value-type="string" calcext:value-type="string">
            <text:p>1ドローする</text:p>
          </table:table-cell>
          <table:table-cell table:formula="of:=IFERROR(VLOOKUP([.$V64];[$遺業能力番号.$A$1:$遺業能力番号.$B$9];2;0);0)" office:value-type="float" office:value="4" calcext:value-type="float">
            <text:p>4</text:p>
          </table:table-cell>
          <table:table-cell office:value-type="string" calcext:value-type="string">
            <text:p>https://one-draw.jp/ijinden/cardlist/001/card/01_024.png</text:p>
          </table:table-cell>
          <table:table-cell table:formula="of:=CONCATENATE([$JSON.$A$1];[.$C64];[$JSON.$B$1];[.$E64];[$JSON.$C$1];[.$F64];[$JSON.$D$1];IF(ISNA([.$S64]);&quot;null&quot;;&quot;&quot;&quot;&quot;&amp;[.$S64]&amp;&quot;&quot;&quot;&quot;);[$JSON.$E$1];[.$U64];[$JSON.$F$1];IF(ISNA([.$V64]);&quot;null&quot;;&quot;&quot;&quot;&quot;&amp;[.$V64]&amp;&quot;&quot;&quot;&quot;);[$JSON.$G$1];[.$X64];[$JSON.$H$1];[.$H64];[$JSON.$I$1];[.J64];[$JSON.$J$1];[.$L64];[$JSON.$K$1];[.$O64];[$JSON.$L$1];[.$N64];[$JSON.$M$1];[.$R64];[$JSON.$N$1];[.$T64];[$JSON.$O$1];[.$W64];[$JSON.$P$1];[.$A64];[$JSON.$Q$1];[.$B64];[$JSON.$R$1])" office:value-type="string" office:string-value="{&quot;id&quot;:&quot;1-24&quot;,&quot;name&quot;:&quot;孔子&quot;,&quot;kana&quot;:&quot;こうし&quot;,&quot;traitText&quot;:null,&quot;ruleText&quot;:&quot;ガーディアンが自分の戦場に置かれるたび、相手の戦場のガーディアン1体を寝かせる。¶これが戦場にいる間、自分の戦場のイジンは「ブロック+1000」を得る。&quot;,&quot;legacyText&quot;:&quot;1ドローする&quot;,&quot;imageUrl&quot;:&quot;https://one-draw.jp/ijinden/cardlist/001/card/01_024.png&quot;,&quot;expansion&quot;:15,&quot;rarity&quot;:2,&quot;type&quot;:1,&quot;level&quot;:3,&quot;color&quot;:2,&quot;term&quot;:0,&quot;trait&quot;:0,&quot;legacy&quot;:4,&quot;orderTable&quot;:63,&quot;orderDeck&quot;:78}," calcext:value-type="string">
            <text:p>{"id":"1-24","name":"孔子","kana":"こうし","traitText":null,"ruleText":"ガーディアンが自分の戦場に置かれるたび、相手の戦場のガーディアン1体を寝かせる。¶これが戦場にいる間、自分の戦場のイジンは「ブロック+1000」を得る。","legacyText":"1ドローする","imageUrl":"https://one-draw.jp/ijinden/cardlist/001/card/01_024.png","expansion":15,"rarity":2,"type":1,"level":3,"color":2,"term":0,"trait":0,"legacy":4,"orderTable":63,"orderDeck":78},</text:p>
          </table:table-cell>
          <table:table-cell table:number-columns-repeated="16347"/>
        </table:table-row>
        <table:table-row table:style-name="ro2">
          <table:table-cell office:value-type="float" office:value="64" calcext:value-type="float">
            <text:p>64</text:p>
          </table:table-cell>
          <table:table-cell office:value-type="float" office:value="155" calcext:value-type="float">
            <text:p>155</text:p>
          </table:table-cell>
          <table:table-cell office:value-type="string" calcext:value-type="string">
            <text:p>1-25</text:p>
          </table:table-cell>
          <table:table-cell office:value-type="float" office:value="25" calcext:value-type="float">
            <text:p>25</text:p>
          </table:table-cell>
          <table:table-cell office:value-type="string" calcext:value-type="string">
            <text:p>始皇帝</text:p>
          </table:table-cell>
          <table:table-cell office:value-type="string" calcext:value-type="string">
            <text:p>しこうてい</text:p>
          </table:table-cell>
          <table:table-cell office:value-type="string" calcext:value-type="string">
            <text:p>第１弾ブースターパック</text:p>
          </table:table-cell>
          <table:table-cell table:formula="of:=VLOOKUP([.G65];[$収録番号.$A$1:$収録番号.$B$9];2;0)" office:value-type="float" office:value="15" calcext:value-type="float">
            <text:p>15</text:p>
          </table:table-cell>
          <table:table-cell office:value-type="string" calcext:value-type="string">
            <text:p>N</text:p>
          </table:table-cell>
          <table:table-cell table:formula="of:=VLOOKUP([.I65];[$レアリティ番号.$A$1:$レアリティ番号.$B$4];2;0)" office:value-type="float" office:value="1" calcext:value-type="float">
            <text:p>1</text:p>
          </table:table-cell>
          <table:table-cell office:value-type="string" calcext:value-type="string">
            <text:p>イジン</text:p>
          </table:table-cell>
          <table:table-cell table:formula="of:=VLOOKUP([.K65];[$種類番号.$A$1:$種類番号.$B$4];2;0)" office:value-type="float" office:value="1" calcext:value-type="float">
            <text:p>1</text:p>
          </table:table-cell>
          <table:table-cell office:value-type="string" calcext:value-type="string">
            <text:p>青</text:p>
          </table:table-cell>
          <table:table-cell table:formula="of:=VLOOKUP([.M65];[$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6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65];[$特性番号.$A$1:$特性番号.$B$8];2;0);0)" office:value-type="float" office:value="0" calcext:value-type="float">
            <text:p>0</text:p>
          </table:table-cell>
          <table:table-cell office:value-type="string" calcext:value-type="string">
            <text:p>戦場に置かれたとき、自分の魔力ゾーンのマリョク1つを裏にして発動できる。相手の魔力ゾーンのマリョク1つを裏にする。¶これが戦場にいる間「執筆」は発動しない。</text:p>
          </table:table-cell>
          <table:table-cell table:style-name="ce8" table:formula="of:=NA()" office:value-type="string" office:string-value="" calcext:value-type="error">
            <text:p>#N/A</text:p>
          </table:table-cell>
          <table:table-cell table:formula="of:=IFERROR(VLOOKUP([.$V65];[$遺業能力番号.$A$1:$遺業能力番号.$B$9];2;0);0)" office:value-type="float" office:value="0" calcext:value-type="float">
            <text:p>0</text:p>
          </table:table-cell>
          <table:table-cell office:value-type="string" calcext:value-type="string">
            <text:p>https://one-draw.jp/ijinden/cardlist/001/card/01_025.png</text:p>
          </table:table-cell>
          <table:table-cell table:formula="of:=CONCATENATE([$JSON.$A$1];[.$C65];[$JSON.$B$1];[.$E65];[$JSON.$C$1];[.$F65];[$JSON.$D$1];IF(ISNA([.$S65]);&quot;null&quot;;&quot;&quot;&quot;&quot;&amp;[.$S65]&amp;&quot;&quot;&quot;&quot;);[$JSON.$E$1];[.$U65];[$JSON.$F$1];IF(ISNA([.$V65]);&quot;null&quot;;&quot;&quot;&quot;&quot;&amp;[.$V65]&amp;&quot;&quot;&quot;&quot;);[$JSON.$G$1];[.$X65];[$JSON.$H$1];[.$H65];[$JSON.$I$1];[.J65];[$JSON.$J$1];[.$L65];[$JSON.$K$1];[.$O65];[$JSON.$L$1];[.$N65];[$JSON.$M$1];[.$R65];[$JSON.$N$1];[.$T65];[$JSON.$O$1];[.$W65];[$JSON.$P$1];[.$A65];[$JSON.$Q$1];[.$B65];[$JSON.$R$1])" office:value-type="string" office:string-value="{&quot;id&quot;:&quot;1-25&quot;,&quot;name&quot;:&quot;始皇帝&quot;,&quot;kana&quot;:&quot;しこうてい&quot;,&quot;traitText&quot;:null,&quot;ruleText&quot;:&quot;戦場に置かれたとき、自分の魔力ゾーンのマリョク1つを裏にして発動できる。相手の魔力ゾーンのマリョク1つを裏にする。¶これが戦場にいる間「執筆」は発動しない。&quot;,&quot;legacyText&quot;:null,&quot;imageUrl&quot;:&quot;https://one-draw.jp/ijinden/cardlist/001/card/01_025.png&quot;,&quot;expansion&quot;:15,&quot;rarity&quot;:1,&quot;type&quot;:1,&quot;level&quot;:5,&quot;color&quot;:2,&quot;term&quot;:0,&quot;trait&quot;:0,&quot;legacy&quot;:0,&quot;orderTable&quot;:64,&quot;orderDeck&quot;:155}," calcext:value-type="string">
            <text:p>{"id":"1-25","name":"始皇帝","kana":"しこうてい","traitText":null,"ruleText":"戦場に置かれたとき、自分の魔力ゾーンのマリョク1つを裏にして発動できる。相手の魔力ゾーンのマリョク1つを裏にする。¶これが戦場にいる間「執筆」は発動しない。","legacyText":null,"imageUrl":"https://one-draw.jp/ijinden/cardlist/001/card/01_025.png","expansion":15,"rarity":1,"type":1,"level":5,"color":2,"term":0,"trait":0,"legacy":0,"orderTable":64,"orderDeck":155},</text:p>
          </table:table-cell>
          <table:table-cell table:number-columns-repeated="16347"/>
        </table:table-row>
        <table:table-row table:style-name="ro2">
          <table:table-cell office:value-type="float" office:value="65" calcext:value-type="float">
            <text:p>65</text:p>
          </table:table-cell>
          <table:table-cell office:value-type="float" office:value="79" calcext:value-type="float">
            <text:p>79</text:p>
          </table:table-cell>
          <table:table-cell office:value-type="string" calcext:value-type="string">
            <text:p>1-26</text:p>
          </table:table-cell>
          <table:table-cell office:value-type="float" office:value="26" calcext:value-type="float">
            <text:p>26</text:p>
          </table:table-cell>
          <table:table-cell office:value-type="string" calcext:value-type="string">
            <text:p>メアリー1世</text:p>
          </table:table-cell>
          <table:table-cell office:value-type="string" calcext:value-type="string">
            <text:p>めありーいっせい</text:p>
          </table:table-cell>
          <table:table-cell office:value-type="string" calcext:value-type="string">
            <text:p>第１弾ブースターパック</text:p>
          </table:table-cell>
          <table:table-cell table:formula="of:=VLOOKUP([.G66];[$収録番号.$A$1:$収録番号.$B$9];2;0)" office:value-type="float" office:value="15" calcext:value-type="float">
            <text:p>15</text:p>
          </table:table-cell>
          <table:table-cell office:value-type="string" calcext:value-type="string">
            <text:p>N</text:p>
          </table:table-cell>
          <table:table-cell table:formula="of:=VLOOKUP([.I66];[$レアリティ番号.$A$1:$レアリティ番号.$B$4];2;0)" office:value-type="float" office:value="1" calcext:value-type="float">
            <text:p>1</text:p>
          </table:table-cell>
          <table:table-cell office:value-type="string" calcext:value-type="string">
            <text:p>イジン</text:p>
          </table:table-cell>
          <table:table-cell table:formula="of:=VLOOKUP([.K66];[$種類番号.$A$1:$種類番号.$B$4];2;0)" office:value-type="float" office:value="1" calcext:value-type="float">
            <text:p>1</text:p>
          </table:table-cell>
          <table:table-cell office:value-type="string" calcext:value-type="string">
            <text:p>青</text:p>
          </table:table-cell>
          <table:table-cell table:formula="of:=VLOOKUP([.M66];[$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6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66];[$特性番号.$A$1:$特性番号.$B$8];2;0);0)" office:value-type="float" office:value="0" calcext:value-type="float">
            <text:p>0</text:p>
          </table:table-cell>
          <table:table-cell office:value-type="string" calcext:value-type="string">
            <text:p>戦場に置かれたとき、相手の手札を見てマリョクでないカード1つを墓地に置く。</text:p>
          </table:table-cell>
          <table:table-cell table:style-name="ce8" table:formula="of:=NA()" office:value-type="string" office:string-value="" calcext:value-type="error">
            <text:p>#N/A</text:p>
          </table:table-cell>
          <table:table-cell table:formula="of:=IFERROR(VLOOKUP([.$V66];[$遺業能力番号.$A$1:$遺業能力番号.$B$9];2;0);0)" office:value-type="float" office:value="0" calcext:value-type="float">
            <text:p>0</text:p>
          </table:table-cell>
          <table:table-cell office:value-type="string" calcext:value-type="string">
            <text:p>https://one-draw.jp/ijinden/cardlist/001/card/01_026.png</text:p>
          </table:table-cell>
          <table:table-cell table:formula="of:=CONCATENATE([$JSON.$A$1];[.$C66];[$JSON.$B$1];[.$E66];[$JSON.$C$1];[.$F66];[$JSON.$D$1];IF(ISNA([.$S66]);&quot;null&quot;;&quot;&quot;&quot;&quot;&amp;[.$S66]&amp;&quot;&quot;&quot;&quot;);[$JSON.$E$1];[.$U66];[$JSON.$F$1];IF(ISNA([.$V66]);&quot;null&quot;;&quot;&quot;&quot;&quot;&amp;[.$V66]&amp;&quot;&quot;&quot;&quot;);[$JSON.$G$1];[.$X66];[$JSON.$H$1];[.$H66];[$JSON.$I$1];[.J66];[$JSON.$J$1];[.$L66];[$JSON.$K$1];[.$O66];[$JSON.$L$1];[.$N66];[$JSON.$M$1];[.$R66];[$JSON.$N$1];[.$T66];[$JSON.$O$1];[.$W66];[$JSON.$P$1];[.$A66];[$JSON.$Q$1];[.$B66];[$JSON.$R$1])" office:value-type="string" office:string-value="{&quot;id&quot;:&quot;1-26&quot;,&quot;name&quot;:&quot;メアリー1世&quot;,&quot;kana&quot;:&quot;めありーいっせい&quot;,&quot;traitText&quot;:null,&quot;ruleText&quot;:&quot;戦場に置かれたとき、相手の手札を見てマリョクでないカード1つを墓地に置く。&quot;,&quot;legacyText&quot;:null,&quot;imageUrl&quot;:&quot;https://one-draw.jp/ijinden/cardlist/001/card/01_026.png&quot;,&quot;expansion&quot;:15,&quot;rarity&quot;:1,&quot;type&quot;:1,&quot;level&quot;:3,&quot;color&quot;:2,&quot;term&quot;:0,&quot;trait&quot;:0,&quot;legacy&quot;:0,&quot;orderTable&quot;:65,&quot;orderDeck&quot;:79}," calcext:value-type="string">
            <text:p>{"id":"1-26","name":"メアリー1世","kana":"めありーいっせい","traitText":null,"ruleText":"戦場に置かれたとき、相手の手札を見てマリョクでないカード1つを墓地に置く。","legacyText":null,"imageUrl":"https://one-draw.jp/ijinden/cardlist/001/card/01_026.png","expansion":15,"rarity":1,"type":1,"level":3,"color":2,"term":0,"trait":0,"legacy":0,"orderTable":65,"orderDeck":79},</text:p>
          </table:table-cell>
          <table:table-cell table:number-columns-repeated="16347"/>
        </table:table-row>
        <table:table-row table:style-name="ro2">
          <table:table-cell office:value-type="float" office:value="66" calcext:value-type="float">
            <text:p>66</text:p>
          </table:table-cell>
          <table:table-cell office:value-type="float" office:value="114" calcext:value-type="float">
            <text:p>114</text:p>
          </table:table-cell>
          <table:table-cell office:value-type="string" calcext:value-type="string">
            <text:p>1-27</text:p>
          </table:table-cell>
          <table:table-cell office:value-type="float" office:value="27" calcext:value-type="float">
            <text:p>27</text:p>
          </table:table-cell>
          <table:table-cell office:value-type="string" calcext:value-type="string">
            <text:p>玄宗</text:p>
          </table:table-cell>
          <table:table-cell office:value-type="string" calcext:value-type="string">
            <text:p>げんそう</text:p>
          </table:table-cell>
          <table:table-cell office:value-type="string" calcext:value-type="string">
            <text:p>第１弾ブースターパック</text:p>
          </table:table-cell>
          <table:table-cell table:formula="of:=VLOOKUP([.G67];[$収録番号.$A$1:$収録番号.$B$9];2;0)" office:value-type="float" office:value="15" calcext:value-type="float">
            <text:p>15</text:p>
          </table:table-cell>
          <table:table-cell office:value-type="string" calcext:value-type="string">
            <text:p>N</text:p>
          </table:table-cell>
          <table:table-cell table:formula="of:=VLOOKUP([.I67];[$レアリティ番号.$A$1:$レアリティ番号.$B$4];2;0)" office:value-type="float" office:value="1" calcext:value-type="float">
            <text:p>1</text:p>
          </table:table-cell>
          <table:table-cell office:value-type="string" calcext:value-type="string">
            <text:p>イジン</text:p>
          </table:table-cell>
          <table:table-cell table:formula="of:=VLOOKUP([.K67];[$種類番号.$A$1:$種類番号.$B$4];2;0)" office:value-type="float" office:value="1" calcext:value-type="float">
            <text:p>1</text:p>
          </table:table-cell>
          <table:table-cell office:value-type="string" calcext:value-type="string">
            <text:p>青</text:p>
          </table:table-cell>
          <table:table-cell table:formula="of:=VLOOKUP([.M67];[$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6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67];[$特性番号.$A$1:$特性番号.$B$8];2;0);0)" office:value-type="float" office:value="0" calcext:value-type="float">
            <text:p>0</text:p>
          </table:table-cell>
          <table:table-cell office:value-type="string" calcext:value-type="string">
            <text:p>イジンが相手の戦場に置かれるたび、自分の山札の上から1枚をガーディアンにして戦場に置く。¶これが戦場にいる間、自分の戦場のガーディアンはパワー6000以上のアタッカーを指定してブロッカーになれない。</text:p>
          </table:table-cell>
          <table:table-cell table:style-name="ce8" table:formula="of:=NA()" office:value-type="string" office:string-value="" calcext:value-type="error">
            <text:p>#N/A</text:p>
          </table:table-cell>
          <table:table-cell table:formula="of:=IFERROR(VLOOKUP([.$V67];[$遺業能力番号.$A$1:$遺業能力番号.$B$9];2;0);0)" office:value-type="float" office:value="0" calcext:value-type="float">
            <text:p>0</text:p>
          </table:table-cell>
          <table:table-cell office:value-type="string" calcext:value-type="string">
            <text:p>https://one-draw.jp/ijinden/cardlist/001/card/01_027.png</text:p>
          </table:table-cell>
          <table:table-cell table:formula="of:=CONCATENATE([$JSON.$A$1];[.$C67];[$JSON.$B$1];[.$E67];[$JSON.$C$1];[.$F67];[$JSON.$D$1];IF(ISNA([.$S67]);&quot;null&quot;;&quot;&quot;&quot;&quot;&amp;[.$S67]&amp;&quot;&quot;&quot;&quot;);[$JSON.$E$1];[.$U67];[$JSON.$F$1];IF(ISNA([.$V67]);&quot;null&quot;;&quot;&quot;&quot;&quot;&amp;[.$V67]&amp;&quot;&quot;&quot;&quot;);[$JSON.$G$1];[.$X67];[$JSON.$H$1];[.$H67];[$JSON.$I$1];[.J67];[$JSON.$J$1];[.$L67];[$JSON.$K$1];[.$O67];[$JSON.$L$1];[.$N67];[$JSON.$M$1];[.$R67];[$JSON.$N$1];[.$T67];[$JSON.$O$1];[.$W67];[$JSON.$P$1];[.$A67];[$JSON.$Q$1];[.$B67];[$JSON.$R$1])" office:value-type="string" office:string-value="{&quot;id&quot;:&quot;1-27&quot;,&quot;name&quot;:&quot;玄宗&quot;,&quot;kana&quot;:&quot;げんそう&quot;,&quot;traitText&quot;:null,&quot;ruleText&quot;:&quot;イジンが相手の戦場に置かれるたび、自分の山札の上から1枚をガーディアンにして戦場に置く。¶これが戦場にいる間、自分の戦場のガーディアンはパワー6000以上のアタッカーを指定してブロッカーになれない。&quot;,&quot;legacyText&quot;:null,&quot;imageUrl&quot;:&quot;https://one-draw.jp/ijinden/cardlist/001/card/01_027.png&quot;,&quot;expansion&quot;:15,&quot;rarity&quot;:1,&quot;type&quot;:1,&quot;level&quot;:4,&quot;color&quot;:2,&quot;term&quot;:0,&quot;trait&quot;:0,&quot;legacy&quot;:0,&quot;orderTable&quot;:66,&quot;orderDeck&quot;:114}," calcext:value-type="string">
            <text:p>{"id":"1-27","name":"玄宗","kana":"げんそう","traitText":null,"ruleText":"イジンが相手の戦場に置かれるたび、自分の山札の上から1枚をガーディアンにして戦場に置く。¶これが戦場にいる間、自分の戦場のガーディアンはパワー6000以上のアタッカーを指定してブロッカーになれない。","legacyText":null,"imageUrl":"https://one-draw.jp/ijinden/cardlist/001/card/01_027.png","expansion":15,"rarity":1,"type":1,"level":4,"color":2,"term":0,"trait":0,"legacy":0,"orderTable":66,"orderDeck":114},</text:p>
          </table:table-cell>
          <table:table-cell table:number-columns-repeated="16347"/>
        </table:table-row>
        <table:table-row table:style-name="ro2">
          <table:table-cell office:value-type="float" office:value="67" calcext:value-type="float">
            <text:p>67</text:p>
          </table:table-cell>
          <table:table-cell office:value-type="float" office:value="115" calcext:value-type="float">
            <text:p>115</text:p>
          </table:table-cell>
          <table:table-cell office:value-type="string" calcext:value-type="string">
            <text:p>1-28</text:p>
          </table:table-cell>
          <table:table-cell office:value-type="float" office:value="28" calcext:value-type="float">
            <text:p>28</text:p>
          </table:table-cell>
          <table:table-cell office:value-type="string" calcext:value-type="string">
            <text:p>シャルル7世</text:p>
          </table:table-cell>
          <table:table-cell office:value-type="string" calcext:value-type="string">
            <text:p>しゃるるななせい</text:p>
          </table:table-cell>
          <table:table-cell office:value-type="string" calcext:value-type="string">
            <text:p>第１弾ブースターパック</text:p>
          </table:table-cell>
          <table:table-cell table:formula="of:=VLOOKUP([.G68];[$収録番号.$A$1:$収録番号.$B$9];2;0)" office:value-type="float" office:value="15" calcext:value-type="float">
            <text:p>15</text:p>
          </table:table-cell>
          <table:table-cell office:value-type="string" calcext:value-type="string">
            <text:p>N</text:p>
          </table:table-cell>
          <table:table-cell table:formula="of:=VLOOKUP([.I68];[$レアリティ番号.$A$1:$レアリティ番号.$B$4];2;0)" office:value-type="float" office:value="1" calcext:value-type="float">
            <text:p>1</text:p>
          </table:table-cell>
          <table:table-cell office:value-type="string" calcext:value-type="string">
            <text:p>イジン</text:p>
          </table:table-cell>
          <table:table-cell table:formula="of:=VLOOKUP([.K68];[$種類番号.$A$1:$種類番号.$B$4];2;0)" office:value-type="float" office:value="1" calcext:value-type="float">
            <text:p>1</text:p>
          </table:table-cell>
          <table:table-cell office:value-type="string" calcext:value-type="string">
            <text:p>青</text:p>
          </table:table-cell>
          <table:table-cell table:formula="of:=VLOOKUP([.M68];[$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6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68];[$特性番号.$A$1:$特性番号.$B$8];2;0);0)" office:value-type="float" office:value="0" calcext:value-type="float">
            <text:p>0</text:p>
          </table:table-cell>
          <table:table-cell office:value-type="string" calcext:value-type="string">
            <text:p>自分の墓地のイジン1体につき「パワー+500」を得る。¶相手の戦場のガーディアンが破壊されるたび、1ドローする。</text:p>
          </table:table-cell>
          <table:table-cell table:style-name="ce8" table:formula="of:=NA()" office:value-type="string" office:string-value="" calcext:value-type="error">
            <text:p>#N/A</text:p>
          </table:table-cell>
          <table:table-cell table:formula="of:=IFERROR(VLOOKUP([.$V68];[$遺業能力番号.$A$1:$遺業能力番号.$B$9];2;0);0)" office:value-type="float" office:value="0" calcext:value-type="float">
            <text:p>0</text:p>
          </table:table-cell>
          <table:table-cell office:value-type="string" calcext:value-type="string">
            <text:p>https://one-draw.jp/ijinden/cardlist/001/card/01_028.png</text:p>
          </table:table-cell>
          <table:table-cell table:formula="of:=CONCATENATE([$JSON.$A$1];[.$C68];[$JSON.$B$1];[.$E68];[$JSON.$C$1];[.$F68];[$JSON.$D$1];IF(ISNA([.$S68]);&quot;null&quot;;&quot;&quot;&quot;&quot;&amp;[.$S68]&amp;&quot;&quot;&quot;&quot;);[$JSON.$E$1];[.$U68];[$JSON.$F$1];IF(ISNA([.$V68]);&quot;null&quot;;&quot;&quot;&quot;&quot;&amp;[.$V68]&amp;&quot;&quot;&quot;&quot;);[$JSON.$G$1];[.$X68];[$JSON.$H$1];[.$H68];[$JSON.$I$1];[.J68];[$JSON.$J$1];[.$L68];[$JSON.$K$1];[.$O68];[$JSON.$L$1];[.$N68];[$JSON.$M$1];[.$R68];[$JSON.$N$1];[.$T68];[$JSON.$O$1];[.$W68];[$JSON.$P$1];[.$A68];[$JSON.$Q$1];[.$B68];[$JSON.$R$1])" office:value-type="string" office:string-value="{&quot;id&quot;:&quot;1-28&quot;,&quot;name&quot;:&quot;シャルル7世&quot;,&quot;kana&quot;:&quot;しゃるるななせい&quot;,&quot;traitText&quot;:null,&quot;ruleText&quot;:&quot;自分の墓地のイジン1体につき「パワー+500」を得る。¶相手の戦場のガーディアンが破壊されるたび、1ドローする。&quot;,&quot;legacyText&quot;:null,&quot;imageUrl&quot;:&quot;https://one-draw.jp/ijinden/cardlist/001/card/01_028.png&quot;,&quot;expansion&quot;:15,&quot;rarity&quot;:1,&quot;type&quot;:1,&quot;level&quot;:4,&quot;color&quot;:2,&quot;term&quot;:0,&quot;trait&quot;:0,&quot;legacy&quot;:0,&quot;orderTable&quot;:67,&quot;orderDeck&quot;:115}," calcext:value-type="string">
            <text:p>{"id":"1-28","name":"シャルル7世","kana":"しゃるるななせい","traitText":null,"ruleText":"自分の墓地のイジン1体につき「パワー+500」を得る。¶相手の戦場のガーディアンが破壊されるたび、1ドローする。","legacyText":null,"imageUrl":"https://one-draw.jp/ijinden/cardlist/001/card/01_028.png","expansion":15,"rarity":1,"type":1,"level":4,"color":2,"term":0,"trait":0,"legacy":0,"orderTable":67,"orderDeck":115},</text:p>
          </table:table-cell>
          <table:table-cell table:number-columns-repeated="16347"/>
        </table:table-row>
        <table:table-row table:style-name="ro2">
          <table:table-cell office:value-type="float" office:value="68" calcext:value-type="float">
            <text:p>68</text:p>
          </table:table-cell>
          <table:table-cell office:value-type="float" office:value="116" calcext:value-type="float">
            <text:p>116</text:p>
          </table:table-cell>
          <table:table-cell office:value-type="string" calcext:value-type="string">
            <text:p>1-29</text:p>
          </table:table-cell>
          <table:table-cell office:value-type="float" office:value="29" calcext:value-type="float">
            <text:p>29</text:p>
          </table:table-cell>
          <table:table-cell office:value-type="string" calcext:value-type="string">
            <text:p>フランシスコ・ザビエル</text:p>
          </table:table-cell>
          <table:table-cell office:value-type="string" calcext:value-type="string">
            <text:p>ふらんしすこざびえる</text:p>
          </table:table-cell>
          <table:table-cell office:value-type="string" calcext:value-type="string">
            <text:p>第１弾ブースターパック</text:p>
          </table:table-cell>
          <table:table-cell table:formula="of:=VLOOKUP([.G69];[$収録番号.$A$1:$収録番号.$B$9];2;0)" office:value-type="float" office:value="15" calcext:value-type="float">
            <text:p>15</text:p>
          </table:table-cell>
          <table:table-cell office:value-type="string" calcext:value-type="string">
            <text:p>R</text:p>
          </table:table-cell>
          <table:table-cell table:formula="of:=VLOOKUP([.I69];[$レアリティ番号.$A$1:$レアリティ番号.$B$4];2;0)" office:value-type="float" office:value="2" calcext:value-type="float">
            <text:p>2</text:p>
          </table:table-cell>
          <table:table-cell office:value-type="string" calcext:value-type="string">
            <text:p>イジン</text:p>
          </table:table-cell>
          <table:table-cell table:formula="of:=VLOOKUP([.K69];[$種類番号.$A$1:$種類番号.$B$4];2;0)" office:value-type="float" office:value="1" calcext:value-type="float">
            <text:p>1</text:p>
          </table:table-cell>
          <table:table-cell office:value-type="string" calcext:value-type="string">
            <text:p>青</text:p>
          </table:table-cell>
          <table:table-cell table:formula="of:=VLOOKUP([.M69];[$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office:value-type="string" calcext:value-type="string">
            <text:p>航海</text:p>
          </table:table-cell>
          <table:table-cell table:formula="of:=IFERROR(VLOOKUP([.$Q69];[$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69];[$特性番号.$A$1:$特性番号.$B$8];2;0);0)" office:value-type="float" office:value="0" calcext:value-type="float">
            <text:p>0</text:p>
          </table:table-cell>
          <table:table-cell office:value-type="string" calcext:value-type="string">
            <text:p>航海 - アタッカーになったとき、自分の山札の上から1枚をガーディアンにして戦場に置く。</text:p>
          </table:table-cell>
          <table:table-cell table:style-name="ce8" table:formula="of:=NA()" office:value-type="string" office:string-value="" calcext:value-type="error">
            <text:p>#N/A</text:p>
          </table:table-cell>
          <table:table-cell table:formula="of:=IFERROR(VLOOKUP([.$V69];[$遺業能力番号.$A$1:$遺業能力番号.$B$9];2;0);0)" office:value-type="float" office:value="0" calcext:value-type="float">
            <text:p>0</text:p>
          </table:table-cell>
          <table:table-cell office:value-type="string" calcext:value-type="string">
            <text:p>https://one-draw.jp/ijinden/cardlist/001/card/01_029.png</text:p>
          </table:table-cell>
          <table:table-cell table:formula="of:=CONCATENATE([$JSON.$A$1];[.$C69];[$JSON.$B$1];[.$E69];[$JSON.$C$1];[.$F69];[$JSON.$D$1];IF(ISNA([.$S69]);&quot;null&quot;;&quot;&quot;&quot;&quot;&amp;[.$S69]&amp;&quot;&quot;&quot;&quot;);[$JSON.$E$1];[.$U69];[$JSON.$F$1];IF(ISNA([.$V69]);&quot;null&quot;;&quot;&quot;&quot;&quot;&amp;[.$V69]&amp;&quot;&quot;&quot;&quot;);[$JSON.$G$1];[.$X69];[$JSON.$H$1];[.$H69];[$JSON.$I$1];[.J69];[$JSON.$J$1];[.$L69];[$JSON.$K$1];[.$O69];[$JSON.$L$1];[.$N69];[$JSON.$M$1];[.$R69];[$JSON.$N$1];[.$T69];[$JSON.$O$1];[.$W69];[$JSON.$P$1];[.$A69];[$JSON.$Q$1];[.$B69];[$JSON.$R$1])" office:value-type="string" office:string-value="{&quot;id&quot;:&quot;1-29&quot;,&quot;name&quot;:&quot;フランシスコ・ザビエル&quot;,&quot;kana&quot;:&quot;ふらんしすこざびえる&quot;,&quot;traitText&quot;:null,&quot;ruleText&quot;:&quot;航海 - アタッカーになったとき、自分の山札の上から1枚をガーディアンにして戦場に置く。&quot;,&quot;legacyText&quot;:null,&quot;imageUrl&quot;:&quot;https://one-draw.jp/ijinden/cardlist/001/card/01_029.png&quot;,&quot;expansion&quot;:15,&quot;rarity&quot;:2,&quot;type&quot;:1,&quot;level&quot;:4,&quot;color&quot;:2,&quot;term&quot;:1,&quot;trait&quot;:0,&quot;legacy&quot;:0,&quot;orderTable&quot;:68,&quot;orderDeck&quot;:116}," calcext:value-type="string">
            <text:p>{"id":"1-29","name":"フランシスコ・ザビエル","kana":"ふらんしすこざびえる","traitText":null,"ruleText":"航海 - アタッカーになったとき、自分の山札の上から1枚をガーディアンにして戦場に置く。","legacyText":null,"imageUrl":"https://one-draw.jp/ijinden/cardlist/001/card/01_029.png","expansion":15,"rarity":2,"type":1,"level":4,"color":2,"term":1,"trait":0,"legacy":0,"orderTable":68,"orderDeck":116},</text:p>
          </table:table-cell>
          <table:table-cell table:number-columns-repeated="16347"/>
        </table:table-row>
        <table:table-row table:style-name="ro2">
          <table:table-cell office:value-type="float" office:value="69" calcext:value-type="float">
            <text:p>69</text:p>
          </table:table-cell>
          <table:table-cell office:value-type="float" office:value="156" calcext:value-type="float">
            <text:p>156</text:p>
          </table:table-cell>
          <table:table-cell office:value-type="string" calcext:value-type="string">
            <text:p>1-30</text:p>
          </table:table-cell>
          <table:table-cell office:value-type="float" office:value="30" calcext:value-type="float">
            <text:p>30</text:p>
          </table:table-cell>
          <table:table-cell office:value-type="string" calcext:value-type="string">
            <text:p>チンギス・ハン</text:p>
          </table:table-cell>
          <table:table-cell office:value-type="string" calcext:value-type="string">
            <text:p>ちんぎすはん</text:p>
          </table:table-cell>
          <table:table-cell office:value-type="string" calcext:value-type="string">
            <text:p>第１弾ブースターパック</text:p>
          </table:table-cell>
          <table:table-cell table:formula="of:=VLOOKUP([.G70];[$収録番号.$A$1:$収録番号.$B$9];2;0)" office:value-type="float" office:value="15" calcext:value-type="float">
            <text:p>15</text:p>
          </table:table-cell>
          <table:table-cell office:value-type="string" calcext:value-type="string">
            <text:p>R</text:p>
          </table:table-cell>
          <table:table-cell table:formula="of:=VLOOKUP([.I70];[$レアリティ番号.$A$1:$レアリティ番号.$B$4];2;0)" office:value-type="float" office:value="2" calcext:value-type="float">
            <text:p>2</text:p>
          </table:table-cell>
          <table:table-cell office:value-type="string" calcext:value-type="string">
            <text:p>イジン</text:p>
          </table:table-cell>
          <table:table-cell table:formula="of:=VLOOKUP([.K70];[$種類番号.$A$1:$種類番号.$B$4];2;0)" office:value-type="float" office:value="1" calcext:value-type="float">
            <text:p>1</text:p>
          </table:table-cell>
          <table:table-cell office:value-type="string" calcext:value-type="string">
            <text:p>青</text:p>
          </table:table-cell>
          <table:table-cell table:formula="of:=VLOOKUP([.M70];[$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7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70];[$特性番号.$A$1:$特性番号.$B$8];2;0);0)" office:value-type="float" office:value="0" calcext:value-type="float">
            <text:p>0</text:p>
          </table:table-cell>
          <table:table-cell office:value-type="string" calcext:value-type="string">
            <text:p>ダブルプレッシャー¶戦場に置かれたとき、魔力ゾーンの裏のカードすべてをガーディアンにして戦場に置く。</text:p>
          </table:table-cell>
          <table:table-cell table:style-name="ce8" table:formula="of:=NA()" office:value-type="string" office:string-value="" calcext:value-type="error">
            <text:p>#N/A</text:p>
          </table:table-cell>
          <table:table-cell table:formula="of:=IFERROR(VLOOKUP([.$V70];[$遺業能力番号.$A$1:$遺業能力番号.$B$9];2;0);0)" office:value-type="float" office:value="0" calcext:value-type="float">
            <text:p>0</text:p>
          </table:table-cell>
          <table:table-cell office:value-type="string" calcext:value-type="string">
            <text:p>https://one-draw.jp/ijinden/cardlist/001/card/01_030.png</text:p>
          </table:table-cell>
          <table:table-cell table:formula="of:=CONCATENATE([$JSON.$A$1];[.$C70];[$JSON.$B$1];[.$E70];[$JSON.$C$1];[.$F70];[$JSON.$D$1];IF(ISNA([.$S70]);&quot;null&quot;;&quot;&quot;&quot;&quot;&amp;[.$S70]&amp;&quot;&quot;&quot;&quot;);[$JSON.$E$1];[.$U70];[$JSON.$F$1];IF(ISNA([.$V70]);&quot;null&quot;;&quot;&quot;&quot;&quot;&amp;[.$V70]&amp;&quot;&quot;&quot;&quot;);[$JSON.$G$1];[.$X70];[$JSON.$H$1];[.$H70];[$JSON.$I$1];[.J70];[$JSON.$J$1];[.$L70];[$JSON.$K$1];[.$O70];[$JSON.$L$1];[.$N70];[$JSON.$M$1];[.$R70];[$JSON.$N$1];[.$T70];[$JSON.$O$1];[.$W70];[$JSON.$P$1];[.$A70];[$JSON.$Q$1];[.$B70];[$JSON.$R$1])" office:value-type="string" office:string-value="{&quot;id&quot;:&quot;1-30&quot;,&quot;name&quot;:&quot;チンギス・ハン&quot;,&quot;kana&quot;:&quot;ちんぎすはん&quot;,&quot;traitText&quot;:null,&quot;ruleText&quot;:&quot;ダブルプレッシャー¶戦場に置かれたとき、魔力ゾーンの裏のカードすべてをガーディアンにして戦場に置く。&quot;,&quot;legacyText&quot;:null,&quot;imageUrl&quot;:&quot;https://one-draw.jp/ijinden/cardlist/001/card/01_030.png&quot;,&quot;expansion&quot;:15,&quot;rarity&quot;:2,&quot;type&quot;:1,&quot;level&quot;:5,&quot;color&quot;:2,&quot;term&quot;:0,&quot;trait&quot;:0,&quot;legacy&quot;:0,&quot;orderTable&quot;:69,&quot;orderDeck&quot;:156}," calcext:value-type="string">
            <text:p>{"id":"1-30","name":"チンギス・ハン","kana":"ちんぎすはん","traitText":null,"ruleText":"ダブルプレッシャー¶戦場に置かれたとき、魔力ゾーンの裏のカードすべてをガーディアンにして戦場に置く。","legacyText":null,"imageUrl":"https://one-draw.jp/ijinden/cardlist/001/card/01_030.png","expansion":15,"rarity":2,"type":1,"level":5,"color":2,"term":0,"trait":0,"legacy":0,"orderTable":69,"orderDeck":156},</text:p>
          </table:table-cell>
          <table:table-cell table:number-columns-repeated="16347"/>
        </table:table-row>
        <table:table-row table:style-name="ro2">
          <table:table-cell office:value-type="float" office:value="70" calcext:value-type="float">
            <text:p>70</text:p>
          </table:table-cell>
          <table:table-cell office:value-type="float" office:value="157" calcext:value-type="float">
            <text:p>157</text:p>
          </table:table-cell>
          <table:table-cell office:value-type="string" calcext:value-type="string">
            <text:p>1-31</text:p>
          </table:table-cell>
          <table:table-cell office:value-type="float" office:value="31" calcext:value-type="float">
            <text:p>31</text:p>
          </table:table-cell>
          <table:table-cell office:value-type="string" calcext:value-type="string">
            <text:p>ミケランジェロ</text:p>
          </table:table-cell>
          <table:table-cell office:value-type="string" calcext:value-type="string">
            <text:p>みけらんじぇろ</text:p>
          </table:table-cell>
          <table:table-cell office:value-type="string" calcext:value-type="string">
            <text:p>第１弾ブースターパック</text:p>
          </table:table-cell>
          <table:table-cell table:formula="of:=VLOOKUP([.G71];[$収録番号.$A$1:$収録番号.$B$9];2;0)" office:value-type="float" office:value="15" calcext:value-type="float">
            <text:p>15</text:p>
          </table:table-cell>
          <table:table-cell office:value-type="string" calcext:value-type="string">
            <text:p>N</text:p>
          </table:table-cell>
          <table:table-cell table:formula="of:=VLOOKUP([.I71];[$レアリティ番号.$A$1:$レアリティ番号.$B$4];2;0)" office:value-type="float" office:value="1" calcext:value-type="float">
            <text:p>1</text:p>
          </table:table-cell>
          <table:table-cell office:value-type="string" calcext:value-type="string">
            <text:p>イジン</text:p>
          </table:table-cell>
          <table:table-cell table:formula="of:=VLOOKUP([.K71];[$種類番号.$A$1:$種類番号.$B$4];2;0)" office:value-type="float" office:value="1" calcext:value-type="float">
            <text:p>1</text:p>
          </table:table-cell>
          <table:table-cell office:value-type="string" calcext:value-type="string">
            <text:p>青</text:p>
          </table:table-cell>
          <table:table-cell table:formula="of:=VLOOKUP([.M71];[$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71];[$能力語番号.$A$1:$能力語番号.$B$10];2;0);0)" office:value-type="float" office:value="0" calcext:value-type="float">
            <text:p>0</text:p>
          </table:table-cell>
          <table:table-cell office:value-type="string" calcext:value-type="string">
            <text:p>美術</text:p>
          </table:table-cell>
          <table:table-cell table:formula="of:=IFERROR(VLOOKUP([.$S71];[$特性番号.$A$1:$特性番号.$B$8];2;0);0)" office:value-type="float" office:value="2" calcext:value-type="float">
            <text:p>2</text:p>
          </table:table-cell>
          <table:table-cell office:value-type="string" calcext:value-type="string">
            <text:p>戦場に置かれたとき、自分の墓地のカード1つをガーディアンにして戦場に置く。</text:p>
          </table:table-cell>
          <table:table-cell table:style-name="ce8" table:formula="of:=NA()" office:value-type="string" office:string-value="" calcext:value-type="error">
            <text:p>#N/A</text:p>
          </table:table-cell>
          <table:table-cell table:formula="of:=IFERROR(VLOOKUP([.$V71];[$遺業能力番号.$A$1:$遺業能力番号.$B$9];2;0);0)" office:value-type="float" office:value="0" calcext:value-type="float">
            <text:p>0</text:p>
          </table:table-cell>
          <table:table-cell office:value-type="string" calcext:value-type="string">
            <text:p>https://one-draw.jp/ijinden/cardlist/001/card/01_031.png</text:p>
          </table:table-cell>
          <table:table-cell table:formula="of:=CONCATENATE([$JSON.$A$1];[.$C71];[$JSON.$B$1];[.$E71];[$JSON.$C$1];[.$F71];[$JSON.$D$1];IF(ISNA([.$S71]);&quot;null&quot;;&quot;&quot;&quot;&quot;&amp;[.$S71]&amp;&quot;&quot;&quot;&quot;);[$JSON.$E$1];[.$U71];[$JSON.$F$1];IF(ISNA([.$V71]);&quot;null&quot;;&quot;&quot;&quot;&quot;&amp;[.$V71]&amp;&quot;&quot;&quot;&quot;);[$JSON.$G$1];[.$X71];[$JSON.$H$1];[.$H71];[$JSON.$I$1];[.J71];[$JSON.$J$1];[.$L71];[$JSON.$K$1];[.$O71];[$JSON.$L$1];[.$N71];[$JSON.$M$1];[.$R71];[$JSON.$N$1];[.$T71];[$JSON.$O$1];[.$W71];[$JSON.$P$1];[.$A71];[$JSON.$Q$1];[.$B71];[$JSON.$R$1])" office:value-type="string" office:string-value="{&quot;id&quot;:&quot;1-31&quot;,&quot;name&quot;:&quot;ミケランジェロ&quot;,&quot;kana&quot;:&quot;みけらんじぇろ&quot;,&quot;traitText&quot;:&quot;美術&quot;,&quot;ruleText&quot;:&quot;戦場に置かれたとき、自分の墓地のカード1つをガーディアンにして戦場に置く。&quot;,&quot;legacyText&quot;:null,&quot;imageUrl&quot;:&quot;https://one-draw.jp/ijinden/cardlist/001/card/01_031.png&quot;,&quot;expansion&quot;:15,&quot;rarity&quot;:1,&quot;type&quot;:1,&quot;level&quot;:5,&quot;color&quot;:2,&quot;term&quot;:0,&quot;trait&quot;:2,&quot;legacy&quot;:0,&quot;orderTable&quot;:70,&quot;orderDeck&quot;:157}," calcext:value-type="string">
            <text:p>{"id":"1-31","name":"ミケランジェロ","kana":"みけらんじぇろ","traitText":"美術","ruleText":"戦場に置かれたとき、自分の墓地のカード1つをガーディアンにして戦場に置く。","legacyText":null,"imageUrl":"https://one-draw.jp/ijinden/cardlist/001/card/01_031.png","expansion":15,"rarity":1,"type":1,"level":5,"color":2,"term":0,"trait":2,"legacy":0,"orderTable":70,"orderDeck":157},</text:p>
          </table:table-cell>
          <table:table-cell table:number-columns-repeated="16347"/>
        </table:table-row>
        <table:table-row table:style-name="ro2">
          <table:table-cell office:value-type="float" office:value="71" calcext:value-type="float">
            <text:p>71</text:p>
          </table:table-cell>
          <table:table-cell office:value-type="float" office:value="188" calcext:value-type="float">
            <text:p>188</text:p>
          </table:table-cell>
          <table:table-cell office:value-type="string" calcext:value-type="string">
            <text:p>1-32</text:p>
          </table:table-cell>
          <table:table-cell office:value-type="float" office:value="32" calcext:value-type="float">
            <text:p>32</text:p>
          </table:table-cell>
          <table:table-cell office:value-type="string" calcext:value-type="string">
            <text:p>マリー・アントワネット</text:p>
          </table:table-cell>
          <table:table-cell office:value-type="string" calcext:value-type="string">
            <text:p>まりーあんとわねっと</text:p>
          </table:table-cell>
          <table:table-cell office:value-type="string" calcext:value-type="string">
            <text:p>第１弾ブースターパック</text:p>
          </table:table-cell>
          <table:table-cell table:formula="of:=VLOOKUP([.G72];[$収録番号.$A$1:$収録番号.$B$9];2;0)" office:value-type="float" office:value="15" calcext:value-type="float">
            <text:p>15</text:p>
          </table:table-cell>
          <table:table-cell office:value-type="string" calcext:value-type="string">
            <text:p>N</text:p>
          </table:table-cell>
          <table:table-cell table:formula="of:=VLOOKUP([.I72];[$レアリティ番号.$A$1:$レアリティ番号.$B$4];2;0)" office:value-type="float" office:value="1" calcext:value-type="float">
            <text:p>1</text:p>
          </table:table-cell>
          <table:table-cell office:value-type="string" calcext:value-type="string">
            <text:p>イジン</text:p>
          </table:table-cell>
          <table:table-cell table:formula="of:=VLOOKUP([.K72];[$種類番号.$A$1:$種類番号.$B$4];2;0)" office:value-type="float" office:value="1" calcext:value-type="float">
            <text:p>1</text:p>
          </table:table-cell>
          <table:table-cell office:value-type="string" calcext:value-type="string">
            <text:p>青</text:p>
          </table:table-cell>
          <table:table-cell table:formula="of:=VLOOKUP([.M72];[$色番号.$A$1:$色番号.$B$10];2;0)" office:value-type="float" office:value="2" calcext:value-type="float">
            <text:p>2</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7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72];[$特性番号.$A$1:$特性番号.$B$8];2;0);0)" office:value-type="float" office:value="0" calcext:value-type="float">
            <text:p>0</text:p>
          </table:table-cell>
          <table:table-cell office:value-type="string" calcext:value-type="string">
            <text:p>破壊されたとき、戦場のガーディアンすべてを寝かせる。</text:p>
          </table:table-cell>
          <table:table-cell table:style-name="ce8" office:value-type="string" calcext:value-type="string">
            <text:p>魔力化</text:p>
          </table:table-cell>
          <table:table-cell table:formula="of:=IFERROR(VLOOKUP([.$V72];[$遺業能力番号.$A$1:$遺業能力番号.$B$9];2;0);0)" office:value-type="float" office:value="1" calcext:value-type="float">
            <text:p>1</text:p>
          </table:table-cell>
          <table:table-cell office:value-type="string" calcext:value-type="string">
            <text:p>https://one-draw.jp/ijinden/cardlist/001/card/01_032.png</text:p>
          </table:table-cell>
          <table:table-cell table:formula="of:=CONCATENATE([$JSON.$A$1];[.$C72];[$JSON.$B$1];[.$E72];[$JSON.$C$1];[.$F72];[$JSON.$D$1];IF(ISNA([.$S72]);&quot;null&quot;;&quot;&quot;&quot;&quot;&amp;[.$S72]&amp;&quot;&quot;&quot;&quot;);[$JSON.$E$1];[.$U72];[$JSON.$F$1];IF(ISNA([.$V72]);&quot;null&quot;;&quot;&quot;&quot;&quot;&amp;[.$V72]&amp;&quot;&quot;&quot;&quot;);[$JSON.$G$1];[.$X72];[$JSON.$H$1];[.$H72];[$JSON.$I$1];[.J72];[$JSON.$J$1];[.$L72];[$JSON.$K$1];[.$O72];[$JSON.$L$1];[.$N72];[$JSON.$M$1];[.$R72];[$JSON.$N$1];[.$T72];[$JSON.$O$1];[.$W72];[$JSON.$P$1];[.$A72];[$JSON.$Q$1];[.$B72];[$JSON.$R$1])" office:value-type="string" office:string-value="{&quot;id&quot;:&quot;1-32&quot;,&quot;name&quot;:&quot;マリー・アントワネット&quot;,&quot;kana&quot;:&quot;まりーあんとわねっと&quot;,&quot;traitText&quot;:null,&quot;ruleText&quot;:&quot;破壊されたとき、戦場のガーディアンすべてを寝かせる。&quot;,&quot;legacyText&quot;:&quot;魔力化&quot;,&quot;imageUrl&quot;:&quot;https://one-draw.jp/ijinden/cardlist/001/card/01_032.png&quot;,&quot;expansion&quot;:15,&quot;rarity&quot;:1,&quot;type&quot;:1,&quot;level&quot;:6,&quot;color&quot;:2,&quot;term&quot;:0,&quot;trait&quot;:0,&quot;legacy&quot;:1,&quot;orderTable&quot;:71,&quot;orderDeck&quot;:188}," calcext:value-type="string">
            <text:p>{"id":"1-32","name":"マリー・アントワネット","kana":"まりーあんとわねっと","traitText":null,"ruleText":"破壊されたとき、戦場のガーディアンすべてを寝かせる。","legacyText":"魔力化","imageUrl":"https://one-draw.jp/ijinden/cardlist/001/card/01_032.png","expansion":15,"rarity":1,"type":1,"level":6,"color":2,"term":0,"trait":0,"legacy":1,"orderTable":71,"orderDeck":188},</text:p>
          </table:table-cell>
          <table:table-cell table:number-columns-repeated="16347"/>
        </table:table-row>
        <table:table-row table:style-name="ro2">
          <table:table-cell office:value-type="float" office:value="72" calcext:value-type="float">
            <text:p>72</text:p>
          </table:table-cell>
          <table:table-cell office:value-type="float" office:value="13" calcext:value-type="float">
            <text:p>13</text:p>
          </table:table-cell>
          <table:table-cell office:value-type="string" calcext:value-type="string">
            <text:p>1-33</text:p>
          </table:table-cell>
          <table:table-cell office:value-type="float" office:value="33" calcext:value-type="float">
            <text:p>33</text:p>
          </table:table-cell>
          <table:table-cell office:value-type="string" calcext:value-type="string">
            <text:p>千利休</text:p>
          </table:table-cell>
          <table:table-cell office:value-type="string" calcext:value-type="string">
            <text:p>せんのりきゅう</text:p>
          </table:table-cell>
          <table:table-cell office:value-type="string" calcext:value-type="string">
            <text:p>第１弾ブースターパック</text:p>
          </table:table-cell>
          <table:table-cell table:formula="of:=VLOOKUP([.G73];[$収録番号.$A$1:$収録番号.$B$9];2;0)" office:value-type="float" office:value="15" calcext:value-type="float">
            <text:p>15</text:p>
          </table:table-cell>
          <table:table-cell office:value-type="string" calcext:value-type="string">
            <text:p>R</text:p>
          </table:table-cell>
          <table:table-cell table:formula="of:=VLOOKUP([.I73];[$レアリティ番号.$A$1:$レアリティ番号.$B$4];2;0)" office:value-type="float" office:value="2" calcext:value-type="float">
            <text:p>2</text:p>
          </table:table-cell>
          <table:table-cell office:value-type="string" calcext:value-type="string">
            <text:p>イジン</text:p>
          </table:table-cell>
          <table:table-cell table:formula="of:=VLOOKUP([.K73];[$種類番号.$A$1:$種類番号.$B$4];2;0)" office:value-type="float" office:value="1" calcext:value-type="float">
            <text:p>1</text:p>
          </table:table-cell>
          <table:table-cell office:value-type="string" calcext:value-type="string">
            <text:p>緑</text:p>
          </table:table-cell>
          <table:table-cell table:formula="of:=VLOOKUP([.M73];[$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7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73];[$特性番号.$A$1:$特性番号.$B$8];2;0);0)" office:value-type="float" office:value="0" calcext:value-type="float">
            <text:p>0</text:p>
          </table:table-cell>
          <table:table-cell office:value-type="string" calcext:value-type="string">
            <text:p>戦場に置かれたとき、戦場に赤のイジンがいるなら発動する。イジン召喚権+1する。¶自分はマホウ使用に際し、自分の手札をすきなだけ墓地に置いてもよい。墓地に置いた1枚につき、手札のマホウの魔力コストは1減る。</text:p>
          </table:table-cell>
          <table:table-cell table:style-name="ce8" office:value-type="string" calcext:value-type="string">
            <text:p>1ドローする</text:p>
          </table:table-cell>
          <table:table-cell table:formula="of:=IFERROR(VLOOKUP([.$V73];[$遺業能力番号.$A$1:$遺業能力番号.$B$9];2;0);0)" office:value-type="float" office:value="4" calcext:value-type="float">
            <text:p>4</text:p>
          </table:table-cell>
          <table:table-cell office:value-type="string" calcext:value-type="string">
            <text:p>https://one-draw.jp/ijinden/cardlist/001/card/01_033.png</text:p>
          </table:table-cell>
          <table:table-cell table:formula="of:=CONCATENATE([$JSON.$A$1];[.$C73];[$JSON.$B$1];[.$E73];[$JSON.$C$1];[.$F73];[$JSON.$D$1];IF(ISNA([.$S73]);&quot;null&quot;;&quot;&quot;&quot;&quot;&amp;[.$S73]&amp;&quot;&quot;&quot;&quot;);[$JSON.$E$1];[.$U73];[$JSON.$F$1];IF(ISNA([.$V73]);&quot;null&quot;;&quot;&quot;&quot;&quot;&amp;[.$V73]&amp;&quot;&quot;&quot;&quot;);[$JSON.$G$1];[.$X73];[$JSON.$H$1];[.$H73];[$JSON.$I$1];[.J73];[$JSON.$J$1];[.$L73];[$JSON.$K$1];[.$O73];[$JSON.$L$1];[.$N73];[$JSON.$M$1];[.$R73];[$JSON.$N$1];[.$T73];[$JSON.$O$1];[.$W73];[$JSON.$P$1];[.$A73];[$JSON.$Q$1];[.$B73];[$JSON.$R$1])" office:value-type="string" office:string-value="{&quot;id&quot;:&quot;1-33&quot;,&quot;name&quot;:&quot;千利休&quot;,&quot;kana&quot;:&quot;せんのりきゅう&quot;,&quot;traitText&quot;:null,&quot;ruleText&quot;:&quot;戦場に置かれたとき、戦場に赤のイジンがいるなら発動する。イジン召喚権+1する。¶自分はマホウ使用に際し、自分の手札をすきなだけ墓地に置いてもよい。墓地に置いた1枚につき、手札のマホウの魔力コストは1減る。&quot;,&quot;legacyText&quot;:&quot;1ドローする&quot;,&quot;imageUrl&quot;:&quot;https://one-draw.jp/ijinden/cardlist/001/card/01_033.png&quot;,&quot;expansion&quot;:15,&quot;rarity&quot;:2,&quot;type&quot;:1,&quot;level&quot;:1,&quot;color&quot;:4,&quot;term&quot;:0,&quot;trait&quot;:0,&quot;legacy&quot;:4,&quot;orderTable&quot;:72,&quot;orderDeck&quot;:13}," calcext:value-type="string">
            <text:p>{"id":"1-33","name":"千利休","kana":"せんのりきゅう","traitText":null,"ruleText":"戦場に置かれたとき、戦場に赤のイジンがいるなら発動する。イジン召喚権+1する。¶自分はマホウ使用に際し、自分の手札をすきなだけ墓地に置いてもよい。墓地に置いた1枚につき、手札のマホウの魔力コストは1減る。","legacyText":"1ドローする","imageUrl":"https://one-draw.jp/ijinden/cardlist/001/card/01_033.png","expansion":15,"rarity":2,"type":1,"level":1,"color":4,"term":0,"trait":0,"legacy":4,"orderTable":72,"orderDeck":13},</text:p>
          </table:table-cell>
          <table:table-cell table:number-columns-repeated="16347"/>
        </table:table-row>
        <table:table-row table:style-name="ro2">
          <table:table-cell office:value-type="float" office:value="73" calcext:value-type="float">
            <text:p>73</text:p>
          </table:table-cell>
          <table:table-cell office:value-type="float" office:value="45" calcext:value-type="float">
            <text:p>45</text:p>
          </table:table-cell>
          <table:table-cell office:value-type="string" calcext:value-type="string">
            <text:p>1-34</text:p>
          </table:table-cell>
          <table:table-cell office:value-type="float" office:value="34" calcext:value-type="float">
            <text:p>34</text:p>
          </table:table-cell>
          <table:table-cell office:value-type="string" calcext:value-type="string">
            <text:p>狩野永徳</text:p>
          </table:table-cell>
          <table:table-cell office:value-type="string" calcext:value-type="string">
            <text:p>かのうえいとく</text:p>
          </table:table-cell>
          <table:table-cell office:value-type="string" calcext:value-type="string">
            <text:p>第１弾ブースターパック</text:p>
          </table:table-cell>
          <table:table-cell table:formula="of:=VLOOKUP([.G74];[$収録番号.$A$1:$収録番号.$B$9];2;0)" office:value-type="float" office:value="15" calcext:value-type="float">
            <text:p>15</text:p>
          </table:table-cell>
          <table:table-cell office:value-type="string" calcext:value-type="string">
            <text:p>N</text:p>
          </table:table-cell>
          <table:table-cell table:formula="of:=VLOOKUP([.I74];[$レアリティ番号.$A$1:$レアリティ番号.$B$4];2;0)" office:value-type="float" office:value="1" calcext:value-type="float">
            <text:p>1</text:p>
          </table:table-cell>
          <table:table-cell office:value-type="string" calcext:value-type="string">
            <text:p>イジン</text:p>
          </table:table-cell>
          <table:table-cell table:formula="of:=VLOOKUP([.K74];[$種類番号.$A$1:$種類番号.$B$4];2;0)" office:value-type="float" office:value="1" calcext:value-type="float">
            <text:p>1</text:p>
          </table:table-cell>
          <table:table-cell office:value-type="string" calcext:value-type="string">
            <text:p>緑</text:p>
          </table:table-cell>
          <table:table-cell table:formula="of:=VLOOKUP([.M74];[$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74];[$能力語番号.$A$1:$能力語番号.$B$10];2;0);0)" office:value-type="float" office:value="0" calcext:value-type="float">
            <text:p>0</text:p>
          </table:table-cell>
          <table:table-cell office:value-type="string" calcext:value-type="string">
            <text:p>美術</text:p>
          </table:table-cell>
          <table:table-cell table:formula="of:=IFERROR(VLOOKUP([.$S74];[$特性番号.$A$1:$特性番号.$B$8];2;0);0)" office:value-type="float" office:value="2" calcext:value-type="float">
            <text:p>2</text:p>
          </table:table-cell>
          <table:table-cell office:value-type="string" calcext:value-type="string">
            <text:p>戦場に置かれたとき、戦場に「剣術」イジンがいるなら発動する。1ドローする。</text:p>
          </table:table-cell>
          <table:table-cell table:style-name="ce8" office:value-type="string" calcext:value-type="string">
            <text:p>1ドローする</text:p>
          </table:table-cell>
          <table:table-cell table:formula="of:=IFERROR(VLOOKUP([.$V74];[$遺業能力番号.$A$1:$遺業能力番号.$B$9];2;0);0)" office:value-type="float" office:value="4" calcext:value-type="float">
            <text:p>4</text:p>
          </table:table-cell>
          <table:table-cell office:value-type="string" calcext:value-type="string">
            <text:p>https://one-draw.jp/ijinden/cardlist/001/card/01_034.png</text:p>
          </table:table-cell>
          <table:table-cell table:formula="of:=CONCATENATE([$JSON.$A$1];[.$C74];[$JSON.$B$1];[.$E74];[$JSON.$C$1];[.$F74];[$JSON.$D$1];IF(ISNA([.$S74]);&quot;null&quot;;&quot;&quot;&quot;&quot;&amp;[.$S74]&amp;&quot;&quot;&quot;&quot;);[$JSON.$E$1];[.$U74];[$JSON.$F$1];IF(ISNA([.$V74]);&quot;null&quot;;&quot;&quot;&quot;&quot;&amp;[.$V74]&amp;&quot;&quot;&quot;&quot;);[$JSON.$G$1];[.$X74];[$JSON.$H$1];[.$H74];[$JSON.$I$1];[.J74];[$JSON.$J$1];[.$L74];[$JSON.$K$1];[.$O74];[$JSON.$L$1];[.$N74];[$JSON.$M$1];[.$R74];[$JSON.$N$1];[.$T74];[$JSON.$O$1];[.$W74];[$JSON.$P$1];[.$A74];[$JSON.$Q$1];[.$B74];[$JSON.$R$1])" office:value-type="string" office:string-value="{&quot;id&quot;:&quot;1-34&quot;,&quot;name&quot;:&quot;狩野永徳&quot;,&quot;kana&quot;:&quot;かのうえいとく&quot;,&quot;traitText&quot;:&quot;美術&quot;,&quot;ruleText&quot;:&quot;戦場に置かれたとき、戦場に「剣術」イジンがいるなら発動する。1ドローする。&quot;,&quot;legacyText&quot;:&quot;1ドローする&quot;,&quot;imageUrl&quot;:&quot;https://one-draw.jp/ijinden/cardlist/001/card/01_034.png&quot;,&quot;expansion&quot;:15,&quot;rarity&quot;:1,&quot;type&quot;:1,&quot;level&quot;:2,&quot;color&quot;:4,&quot;term&quot;:0,&quot;trait&quot;:2,&quot;legacy&quot;:4,&quot;orderTable&quot;:73,&quot;orderDeck&quot;:45}," calcext:value-type="string">
            <text:p>{"id":"1-34","name":"狩野永徳","kana":"かのうえいとく","traitText":"美術","ruleText":"戦場に置かれたとき、戦場に「剣術」イジンがいるなら発動する。1ドローする。","legacyText":"1ドローする","imageUrl":"https://one-draw.jp/ijinden/cardlist/001/card/01_034.png","expansion":15,"rarity":1,"type":1,"level":2,"color":4,"term":0,"trait":2,"legacy":4,"orderTable":73,"orderDeck":45},</text:p>
          </table:table-cell>
          <table:table-cell table:number-columns-repeated="16347"/>
        </table:table-row>
        <table:table-row table:style-name="ro2">
          <table:table-cell office:value-type="float" office:value="74" calcext:value-type="float">
            <text:p>74</text:p>
          </table:table-cell>
          <table:table-cell office:value-type="float" office:value="86" calcext:value-type="float">
            <text:p>86</text:p>
          </table:table-cell>
          <table:table-cell office:value-type="string" calcext:value-type="string">
            <text:p>1-35</text:p>
          </table:table-cell>
          <table:table-cell office:value-type="float" office:value="35" calcext:value-type="float">
            <text:p>35</text:p>
          </table:table-cell>
          <table:table-cell office:value-type="string" calcext:value-type="string">
            <text:p>安倍晴明</text:p>
          </table:table-cell>
          <table:table-cell office:value-type="string" calcext:value-type="string">
            <text:p>あべのせいめい</text:p>
          </table:table-cell>
          <table:table-cell office:value-type="string" calcext:value-type="string">
            <text:p>第１弾ブースターパック</text:p>
          </table:table-cell>
          <table:table-cell table:formula="of:=VLOOKUP([.G75];[$収録番号.$A$1:$収録番号.$B$9];2;0)" office:value-type="float" office:value="15" calcext:value-type="float">
            <text:p>15</text:p>
          </table:table-cell>
          <table:table-cell office:value-type="string" calcext:value-type="string">
            <text:p>N</text:p>
          </table:table-cell>
          <table:table-cell table:formula="of:=VLOOKUP([.I75];[$レアリティ番号.$A$1:$レアリティ番号.$B$4];2;0)" office:value-type="float" office:value="1" calcext:value-type="float">
            <text:p>1</text:p>
          </table:table-cell>
          <table:table-cell office:value-type="string" calcext:value-type="string">
            <text:p>イジン</text:p>
          </table:table-cell>
          <table:table-cell table:formula="of:=VLOOKUP([.K75];[$種類番号.$A$1:$種類番号.$B$4];2;0)" office:value-type="float" office:value="1" calcext:value-type="float">
            <text:p>1</text:p>
          </table:table-cell>
          <table:table-cell office:value-type="string" calcext:value-type="string">
            <text:p>緑</text:p>
          </table:table-cell>
          <table:table-cell table:formula="of:=VLOOKUP([.M75];[$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7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75];[$特性番号.$A$1:$特性番号.$B$8];2;0);0)" office:value-type="float" office:value="0" calcext:value-type="float">
            <text:p>0</text:p>
          </table:table-cell>
          <table:table-cell office:value-type="string" calcext:value-type="string">
            <text:p>自分の戦場のガーディアン1体につき「パワー+500」を得る。¶破壊されたとき、自分の戦場のガーディアン1体を墓地に置いて発動できる。これを破壊されていない状態にする。</text:p>
          </table:table-cell>
          <table:table-cell table:style-name="ce8" office:value-type="string" calcext:value-type="string">
            <text:p>魔力化</text:p>
          </table:table-cell>
          <table:table-cell table:formula="of:=IFERROR(VLOOKUP([.$V75];[$遺業能力番号.$A$1:$遺業能力番号.$B$9];2;0);0)" office:value-type="float" office:value="1" calcext:value-type="float">
            <text:p>1</text:p>
          </table:table-cell>
          <table:table-cell office:value-type="string" calcext:value-type="string">
            <text:p>https://one-draw.jp/ijinden/cardlist/001/card/01_035.png</text:p>
          </table:table-cell>
          <table:table-cell table:formula="of:=CONCATENATE([$JSON.$A$1];[.$C75];[$JSON.$B$1];[.$E75];[$JSON.$C$1];[.$F75];[$JSON.$D$1];IF(ISNA([.$S75]);&quot;null&quot;;&quot;&quot;&quot;&quot;&amp;[.$S75]&amp;&quot;&quot;&quot;&quot;);[$JSON.$E$1];[.$U75];[$JSON.$F$1];IF(ISNA([.$V75]);&quot;null&quot;;&quot;&quot;&quot;&quot;&amp;[.$V75]&amp;&quot;&quot;&quot;&quot;);[$JSON.$G$1];[.$X75];[$JSON.$H$1];[.$H75];[$JSON.$I$1];[.J75];[$JSON.$J$1];[.$L75];[$JSON.$K$1];[.$O75];[$JSON.$L$1];[.$N75];[$JSON.$M$1];[.$R75];[$JSON.$N$1];[.$T75];[$JSON.$O$1];[.$W75];[$JSON.$P$1];[.$A75];[$JSON.$Q$1];[.$B75];[$JSON.$R$1])" office:value-type="string" office:string-value="{&quot;id&quot;:&quot;1-35&quot;,&quot;name&quot;:&quot;安倍晴明&quot;,&quot;kana&quot;:&quot;あべのせいめい&quot;,&quot;traitText&quot;:null,&quot;ruleText&quot;:&quot;自分の戦場のガーディアン1体につき「パワー+500」を得る。¶破壊されたとき、自分の戦場のガーディアン1体を墓地に置いて発動できる。これを破壊されていない状態にする。&quot;,&quot;legacyText&quot;:&quot;魔力化&quot;,&quot;imageUrl&quot;:&quot;https://one-draw.jp/ijinden/cardlist/001/card/01_035.png&quot;,&quot;expansion&quot;:15,&quot;rarity&quot;:1,&quot;type&quot;:1,&quot;level&quot;:3,&quot;color&quot;:4,&quot;term&quot;:0,&quot;trait&quot;:0,&quot;legacy&quot;:1,&quot;orderTable&quot;:74,&quot;orderDeck&quot;:86}," calcext:value-type="string">
            <text:p>{"id":"1-35","name":"安倍晴明","kana":"あべのせいめい","traitText":null,"ruleText":"自分の戦場のガーディアン1体につき「パワー+500」を得る。¶破壊されたとき、自分の戦場のガーディアン1体を墓地に置いて発動できる。これを破壊されていない状態にする。","legacyText":"魔力化","imageUrl":"https://one-draw.jp/ijinden/cardlist/001/card/01_035.png","expansion":15,"rarity":1,"type":1,"level":3,"color":4,"term":0,"trait":0,"legacy":1,"orderTable":74,"orderDeck":86},</text:p>
          </table:table-cell>
          <table:table-cell table:number-columns-repeated="16347"/>
        </table:table-row>
        <table:table-row table:style-name="ro2">
          <table:table-cell office:value-type="float" office:value="75" calcext:value-type="float">
            <text:p>75</text:p>
          </table:table-cell>
          <table:table-cell office:value-type="float" office:value="87" calcext:value-type="float">
            <text:p>87</text:p>
          </table:table-cell>
          <table:table-cell office:value-type="string" calcext:value-type="string">
            <text:p>1-36</text:p>
          </table:table-cell>
          <table:table-cell office:value-type="float" office:value="36" calcext:value-type="float">
            <text:p>36</text:p>
          </table:table-cell>
          <table:table-cell office:value-type="string" calcext:value-type="string">
            <text:p>吉田兼好</text:p>
          </table:table-cell>
          <table:table-cell office:value-type="string" calcext:value-type="string">
            <text:p>よしだけんこう</text:p>
          </table:table-cell>
          <table:table-cell office:value-type="string" calcext:value-type="string">
            <text:p>第１弾ブースターパック</text:p>
          </table:table-cell>
          <table:table-cell table:formula="of:=VLOOKUP([.G76];[$収録番号.$A$1:$収録番号.$B$9];2;0)" office:value-type="float" office:value="15" calcext:value-type="float">
            <text:p>15</text:p>
          </table:table-cell>
          <table:table-cell office:value-type="string" calcext:value-type="string">
            <text:p>N</text:p>
          </table:table-cell>
          <table:table-cell table:formula="of:=VLOOKUP([.I76];[$レアリティ番号.$A$1:$レアリティ番号.$B$4];2;0)" office:value-type="float" office:value="1" calcext:value-type="float">
            <text:p>1</text:p>
          </table:table-cell>
          <table:table-cell office:value-type="string" calcext:value-type="string">
            <text:p>イジン</text:p>
          </table:table-cell>
          <table:table-cell table:formula="of:=VLOOKUP([.K76];[$種類番号.$A$1:$種類番号.$B$4];2;0)" office:value-type="float" office:value="1" calcext:value-type="float">
            <text:p>1</text:p>
          </table:table-cell>
          <table:table-cell office:value-type="string" calcext:value-type="string">
            <text:p>緑</text:p>
          </table:table-cell>
          <table:table-cell table:formula="of:=VLOOKUP([.M76];[$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執筆</text:p>
          </table:table-cell>
          <table:table-cell table:formula="of:=IFERROR(VLOOKUP([.$Q76];[$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76];[$特性番号.$A$1:$特性番号.$B$8];2;0);0)" office:value-type="float" office:value="0" calcext:value-type="float">
            <text:p>0</text:p>
          </table:table-cell>
          <table:table-cell office:value-type="string" calcext:value-type="string">
            <text:p>執筆 - ハイケイが戦場に置かれたとき、そのハイケイがこのターンで2つ目に置かれたハイケイなら発動できる。そのハイケイ1つを裏にして魔力ゾーンに置く。</text:p>
          </table:table-cell>
          <table:table-cell table:style-name="ce8" office:value-type="string" calcext:value-type="string">
            <text:p>1ドローする</text:p>
          </table:table-cell>
          <table:table-cell table:formula="of:=IFERROR(VLOOKUP([.$V76];[$遺業能力番号.$A$1:$遺業能力番号.$B$9];2;0);0)" office:value-type="float" office:value="4" calcext:value-type="float">
            <text:p>4</text:p>
          </table:table-cell>
          <table:table-cell office:value-type="string" calcext:value-type="string">
            <text:p>https://one-draw.jp/ijinden/cardlist/001/card/01_036.png</text:p>
          </table:table-cell>
          <table:table-cell table:formula="of:=CONCATENATE([$JSON.$A$1];[.$C76];[$JSON.$B$1];[.$E76];[$JSON.$C$1];[.$F76];[$JSON.$D$1];IF(ISNA([.$S76]);&quot;null&quot;;&quot;&quot;&quot;&quot;&amp;[.$S76]&amp;&quot;&quot;&quot;&quot;);[$JSON.$E$1];[.$U76];[$JSON.$F$1];IF(ISNA([.$V76]);&quot;null&quot;;&quot;&quot;&quot;&quot;&amp;[.$V76]&amp;&quot;&quot;&quot;&quot;);[$JSON.$G$1];[.$X76];[$JSON.$H$1];[.$H76];[$JSON.$I$1];[.J76];[$JSON.$J$1];[.$L76];[$JSON.$K$1];[.$O76];[$JSON.$L$1];[.$N76];[$JSON.$M$1];[.$R76];[$JSON.$N$1];[.$T76];[$JSON.$O$1];[.$W76];[$JSON.$P$1];[.$A76];[$JSON.$Q$1];[.$B76];[$JSON.$R$1])" office:value-type="string" office:string-value="{&quot;id&quot;:&quot;1-36&quot;,&quot;name&quot;:&quot;吉田兼好&quot;,&quot;kana&quot;:&quot;よしだけんこう&quot;,&quot;traitText&quot;:null,&quot;ruleText&quot;:&quot;執筆 - ハイケイが戦場に置かれたとき、そのハイケイがこのターンで2つ目に置かれたハイケイなら発動できる。そのハイケイ1つを裏にして魔力ゾーンに置く。&quot;,&quot;legacyText&quot;:&quot;1ドローする&quot;,&quot;imageUrl&quot;:&quot;https://one-draw.jp/ijinden/cardlist/001/card/01_036.png&quot;,&quot;expansion&quot;:15,&quot;rarity&quot;:1,&quot;type&quot;:1,&quot;level&quot;:3,&quot;color&quot;:4,&quot;term&quot;:2,&quot;trait&quot;:0,&quot;legacy&quot;:4,&quot;orderTable&quot;:75,&quot;orderDeck&quot;:87}," calcext:value-type="string">
            <text:p>{"id":"1-36","name":"吉田兼好","kana":"よしだけんこう","traitText":null,"ruleText":"執筆 - ハイケイが戦場に置かれたとき、そのハイケイがこのターンで2つ目に置かれたハイケイなら発動できる。そのハイケイ1つを裏にして魔力ゾーンに置く。","legacyText":"1ドローする","imageUrl":"https://one-draw.jp/ijinden/cardlist/001/card/01_036.png","expansion":15,"rarity":1,"type":1,"level":3,"color":4,"term":2,"trait":0,"legacy":4,"orderTable":75,"orderDeck":87},</text:p>
          </table:table-cell>
          <table:table-cell table:number-columns-repeated="16347"/>
        </table:table-row>
        <table:table-row table:style-name="ro2">
          <table:table-cell office:value-type="float" office:value="76" calcext:value-type="float">
            <text:p>76</text:p>
          </table:table-cell>
          <table:table-cell office:value-type="float" office:value="125" calcext:value-type="float">
            <text:p>125</text:p>
          </table:table-cell>
          <table:table-cell office:value-type="string" calcext:value-type="string">
            <text:p>1-37</text:p>
          </table:table-cell>
          <table:table-cell office:value-type="float" office:value="37" calcext:value-type="float">
            <text:p>37</text:p>
          </table:table-cell>
          <table:table-cell office:value-type="string" calcext:value-type="string">
            <text:p>蘆屋道満</text:p>
          </table:table-cell>
          <table:table-cell office:value-type="string" calcext:value-type="string">
            <text:p>あしやどうまん</text:p>
          </table:table-cell>
          <table:table-cell office:value-type="string" calcext:value-type="string">
            <text:p>第１弾ブースターパック</text:p>
          </table:table-cell>
          <table:table-cell table:formula="of:=VLOOKUP([.G77];[$収録番号.$A$1:$収録番号.$B$9];2;0)" office:value-type="float" office:value="15" calcext:value-type="float">
            <text:p>15</text:p>
          </table:table-cell>
          <table:table-cell office:value-type="string" calcext:value-type="string">
            <text:p>N</text:p>
          </table:table-cell>
          <table:table-cell table:formula="of:=VLOOKUP([.I77];[$レアリティ番号.$A$1:$レアリティ番号.$B$4];2;0)" office:value-type="float" office:value="1" calcext:value-type="float">
            <text:p>1</text:p>
          </table:table-cell>
          <table:table-cell office:value-type="string" calcext:value-type="string">
            <text:p>イジン</text:p>
          </table:table-cell>
          <table:table-cell table:formula="of:=VLOOKUP([.K77];[$種類番号.$A$1:$種類番号.$B$4];2;0)" office:value-type="float" office:value="1" calcext:value-type="float">
            <text:p>1</text:p>
          </table:table-cell>
          <table:table-cell office:value-type="string" calcext:value-type="string">
            <text:p>緑</text:p>
          </table:table-cell>
          <table:table-cell table:formula="of:=VLOOKUP([.M77];[$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7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77];[$特性番号.$A$1:$特性番号.$B$8];2;0);0)" office:value-type="float" office:value="0" calcext:value-type="float">
            <text:p>0</text:p>
          </table:table-cell>
          <table:table-cell office:value-type="string" calcext:value-type="string">
            <text:p>ガーディアンが戦場に置かれる際、寝ている状態で戦場に置かれる。</text:p>
          </table:table-cell>
          <table:table-cell table:style-name="ce8" office:value-type="string" calcext:value-type="string">
            <text:p>魔力化</text:p>
          </table:table-cell>
          <table:table-cell table:formula="of:=IFERROR(VLOOKUP([.$V77];[$遺業能力番号.$A$1:$遺業能力番号.$B$9];2;0);0)" office:value-type="float" office:value="1" calcext:value-type="float">
            <text:p>1</text:p>
          </table:table-cell>
          <table:table-cell office:value-type="string" calcext:value-type="string">
            <text:p>https://one-draw.jp/ijinden/cardlist/001/card/01_037.png</text:p>
          </table:table-cell>
          <table:table-cell table:formula="of:=CONCATENATE([$JSON.$A$1];[.$C77];[$JSON.$B$1];[.$E77];[$JSON.$C$1];[.$F77];[$JSON.$D$1];IF(ISNA([.$S77]);&quot;null&quot;;&quot;&quot;&quot;&quot;&amp;[.$S77]&amp;&quot;&quot;&quot;&quot;);[$JSON.$E$1];[.$U77];[$JSON.$F$1];IF(ISNA([.$V77]);&quot;null&quot;;&quot;&quot;&quot;&quot;&amp;[.$V77]&amp;&quot;&quot;&quot;&quot;);[$JSON.$G$1];[.$X77];[$JSON.$H$1];[.$H77];[$JSON.$I$1];[.J77];[$JSON.$J$1];[.$L77];[$JSON.$K$1];[.$O77];[$JSON.$L$1];[.$N77];[$JSON.$M$1];[.$R77];[$JSON.$N$1];[.$T77];[$JSON.$O$1];[.$W77];[$JSON.$P$1];[.$A77];[$JSON.$Q$1];[.$B77];[$JSON.$R$1])" office:value-type="string" office:string-value="{&quot;id&quot;:&quot;1-37&quot;,&quot;name&quot;:&quot;蘆屋道満&quot;,&quot;kana&quot;:&quot;あしやどうまん&quot;,&quot;traitText&quot;:null,&quot;ruleText&quot;:&quot;ガーディアンが戦場に置かれる際、寝ている状態で戦場に置かれる。&quot;,&quot;legacyText&quot;:&quot;魔力化&quot;,&quot;imageUrl&quot;:&quot;https://one-draw.jp/ijinden/cardlist/001/card/01_037.png&quot;,&quot;expansion&quot;:15,&quot;rarity&quot;:1,&quot;type&quot;:1,&quot;level&quot;:4,&quot;color&quot;:4,&quot;term&quot;:0,&quot;trait&quot;:0,&quot;legacy&quot;:1,&quot;orderTable&quot;:76,&quot;orderDeck&quot;:125}," calcext:value-type="string">
            <text:p>{"id":"1-37","name":"蘆屋道満","kana":"あしやどうまん","traitText":null,"ruleText":"ガーディアンが戦場に置かれる際、寝ている状態で戦場に置かれる。","legacyText":"魔力化","imageUrl":"https://one-draw.jp/ijinden/cardlist/001/card/01_037.png","expansion":15,"rarity":1,"type":1,"level":4,"color":4,"term":0,"trait":0,"legacy":1,"orderTable":76,"orderDeck":125},</text:p>
          </table:table-cell>
          <table:table-cell table:number-columns-repeated="16347"/>
        </table:table-row>
        <table:table-row table:style-name="ro2">
          <table:table-cell office:value-type="float" office:value="77" calcext:value-type="float">
            <text:p>77</text:p>
          </table:table-cell>
          <table:table-cell office:value-type="float" office:value="126" calcext:value-type="float">
            <text:p>126</text:p>
          </table:table-cell>
          <table:table-cell office:value-type="string" calcext:value-type="string">
            <text:p>1-38</text:p>
          </table:table-cell>
          <table:table-cell office:value-type="float" office:value="38" calcext:value-type="float">
            <text:p>38</text:p>
          </table:table-cell>
          <table:table-cell office:value-type="string" calcext:value-type="string">
            <text:p>鴨長明</text:p>
          </table:table-cell>
          <table:table-cell office:value-type="string" calcext:value-type="string">
            <text:p>かものちょうめい</text:p>
          </table:table-cell>
          <table:table-cell office:value-type="string" calcext:value-type="string">
            <text:p>第１弾ブースターパック</text:p>
          </table:table-cell>
          <table:table-cell table:formula="of:=VLOOKUP([.G78];[$収録番号.$A$1:$収録番号.$B$9];2;0)" office:value-type="float" office:value="15" calcext:value-type="float">
            <text:p>15</text:p>
          </table:table-cell>
          <table:table-cell office:value-type="string" calcext:value-type="string">
            <text:p>N</text:p>
          </table:table-cell>
          <table:table-cell table:formula="of:=VLOOKUP([.I78];[$レアリティ番号.$A$1:$レアリティ番号.$B$4];2;0)" office:value-type="float" office:value="1" calcext:value-type="float">
            <text:p>1</text:p>
          </table:table-cell>
          <table:table-cell office:value-type="string" calcext:value-type="string">
            <text:p>イジン</text:p>
          </table:table-cell>
          <table:table-cell table:formula="of:=VLOOKUP([.K78];[$種類番号.$A$1:$種類番号.$B$4];2;0)" office:value-type="float" office:value="1" calcext:value-type="float">
            <text:p>1</text:p>
          </table:table-cell>
          <table:table-cell office:value-type="string" calcext:value-type="string">
            <text:p>緑</text:p>
          </table:table-cell>
          <table:table-cell table:formula="of:=VLOOKUP([.M78];[$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office:value-type="string" calcext:value-type="string">
            <text:p>執筆</text:p>
          </table:table-cell>
          <table:table-cell table:formula="of:=IFERROR(VLOOKUP([.$Q78];[$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78];[$特性番号.$A$1:$特性番号.$B$8];2;0);0)" office:value-type="float" office:value="0" calcext:value-type="float">
            <text:p>0</text:p>
          </table:table-cell>
          <table:table-cell office:value-type="string" calcext:value-type="string">
            <text:p>これのイジン召喚に際し、自分の戦場にイジンがいなければ、これはレベル2になる。¶執筆 - この能力はターンに1回しか発動しない。ハイケイが戦場に置かれたときに発動できる。そのハイケイ1つを裏にしてガーディアンにする。</text:p>
          </table:table-cell>
          <table:table-cell table:style-name="ce8" table:formula="of:=NA()" office:value-type="string" office:string-value="" calcext:value-type="error">
            <text:p>#N/A</text:p>
          </table:table-cell>
          <table:table-cell table:formula="of:=IFERROR(VLOOKUP([.$V78];[$遺業能力番号.$A$1:$遺業能力番号.$B$9];2;0);0)" office:value-type="float" office:value="0" calcext:value-type="float">
            <text:p>0</text:p>
          </table:table-cell>
          <table:table-cell office:value-type="string" calcext:value-type="string">
            <text:p>https://one-draw.jp/ijinden/cardlist/001/card/01_038.png</text:p>
          </table:table-cell>
          <table:table-cell table:formula="of:=CONCATENATE([$JSON.$A$1];[.$C78];[$JSON.$B$1];[.$E78];[$JSON.$C$1];[.$F78];[$JSON.$D$1];IF(ISNA([.$S78]);&quot;null&quot;;&quot;&quot;&quot;&quot;&amp;[.$S78]&amp;&quot;&quot;&quot;&quot;);[$JSON.$E$1];[.$U78];[$JSON.$F$1];IF(ISNA([.$V78]);&quot;null&quot;;&quot;&quot;&quot;&quot;&amp;[.$V78]&amp;&quot;&quot;&quot;&quot;);[$JSON.$G$1];[.$X78];[$JSON.$H$1];[.$H78];[$JSON.$I$1];[.J78];[$JSON.$J$1];[.$L78];[$JSON.$K$1];[.$O78];[$JSON.$L$1];[.$N78];[$JSON.$M$1];[.$R78];[$JSON.$N$1];[.$T78];[$JSON.$O$1];[.$W78];[$JSON.$P$1];[.$A78];[$JSON.$Q$1];[.$B78];[$JSON.$R$1])" office:value-type="string" office:string-value="{&quot;id&quot;:&quot;1-38&quot;,&quot;name&quot;:&quot;鴨長明&quot;,&quot;kana&quot;:&quot;かものちょうめい&quot;,&quot;traitText&quot;:null,&quot;ruleText&quot;:&quot;これのイジン召喚に際し、自分の戦場にイジンがいなければ、これはレベル2になる。¶執筆 - この能力はターンに1回しか発動しない。ハイケイが戦場に置かれたときに発動できる。そのハイケイ1つを裏にしてガーディアンにする。&quot;,&quot;legacyText&quot;:null,&quot;imageUrl&quot;:&quot;https://one-draw.jp/ijinden/cardlist/001/card/01_038.png&quot;,&quot;expansion&quot;:15,&quot;rarity&quot;:1,&quot;type&quot;:1,&quot;level&quot;:4,&quot;color&quot;:4,&quot;term&quot;:2,&quot;trait&quot;:0,&quot;legacy&quot;:0,&quot;orderTable&quot;:77,&quot;orderDeck&quot;:126}," calcext:value-type="string">
            <text:p>{"id":"1-38","name":"鴨長明","kana":"かものちょうめい","traitText":null,"ruleText":"これのイジン召喚に際し、自分の戦場にイジンがいなければ、これはレベル2になる。¶執筆 - この能力はターンに1回しか発動しない。ハイケイが戦場に置かれたときに発動できる。そのハイケイ1つを裏にしてガーディアンにする。","legacyText":null,"imageUrl":"https://one-draw.jp/ijinden/cardlist/001/card/01_038.png","expansion":15,"rarity":1,"type":1,"level":4,"color":4,"term":2,"trait":0,"legacy":0,"orderTable":77,"orderDeck":126},</text:p>
          </table:table-cell>
          <table:table-cell table:number-columns-repeated="16347"/>
        </table:table-row>
        <table:table-row table:style-name="ro2">
          <table:table-cell office:value-type="float" office:value="78" calcext:value-type="float">
            <text:p>78</text:p>
          </table:table-cell>
          <table:table-cell office:value-type="float" office:value="127" calcext:value-type="float">
            <text:p>127</text:p>
          </table:table-cell>
          <table:table-cell office:value-type="string" calcext:value-type="string">
            <text:p>1-39</text:p>
          </table:table-cell>
          <table:table-cell office:value-type="float" office:value="39" calcext:value-type="float">
            <text:p>39</text:p>
          </table:table-cell>
          <table:table-cell office:value-type="string" calcext:value-type="string">
            <text:p>ヨハン・ゼバスティアン・バッハ</text:p>
          </table:table-cell>
          <table:table-cell office:value-type="string" calcext:value-type="string">
            <text:p>よはんぜばすてぃあんばっは</text:p>
          </table:table-cell>
          <table:table-cell office:value-type="string" calcext:value-type="string">
            <text:p>第１弾ブースターパック</text:p>
          </table:table-cell>
          <table:table-cell table:formula="of:=VLOOKUP([.G79];[$収録番号.$A$1:$収録番号.$B$9];2;0)" office:value-type="float" office:value="15" calcext:value-type="float">
            <text:p>15</text:p>
          </table:table-cell>
          <table:table-cell office:value-type="string" calcext:value-type="string">
            <text:p>N</text:p>
          </table:table-cell>
          <table:table-cell table:formula="of:=VLOOKUP([.I79];[$レアリティ番号.$A$1:$レアリティ番号.$B$4];2;0)" office:value-type="float" office:value="1" calcext:value-type="float">
            <text:p>1</text:p>
          </table:table-cell>
          <table:table-cell office:value-type="string" calcext:value-type="string">
            <text:p>イジン</text:p>
          </table:table-cell>
          <table:table-cell table:formula="of:=VLOOKUP([.K79];[$種類番号.$A$1:$種類番号.$B$4];2;0)" office:value-type="float" office:value="1" calcext:value-type="float">
            <text:p>1</text:p>
          </table:table-cell>
          <table:table-cell office:value-type="string" calcext:value-type="string">
            <text:p>緑</text:p>
          </table:table-cell>
          <table:table-cell table:formula="of:=VLOOKUP([.M79];[$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79];[$能力語番号.$A$1:$能力語番号.$B$10];2;0);0)" office:value-type="float" office:value="0" calcext:value-type="float">
            <text:p>0</text:p>
          </table:table-cell>
          <table:table-cell office:value-type="string" calcext:value-type="string">
            <text:p>音楽</text:p>
          </table:table-cell>
          <table:table-cell table:formula="of:=IFERROR(VLOOKUP([.$S79];[$特性番号.$A$1:$特性番号.$B$8];2;0);0)" office:value-type="float" office:value="4" calcext:value-type="float">
            <text:p>4</text:p>
          </table:table-cell>
          <table:table-cell office:value-type="string" calcext:value-type="string">
            <text:p>これが戦場にいる間、戦場のイジンとハイケイは「特性：音楽」を得る。</text:p>
          </table:table-cell>
          <table:table-cell table:style-name="ce8" table:formula="of:=NA()" office:value-type="string" office:string-value="" calcext:value-type="error">
            <text:p>#N/A</text:p>
          </table:table-cell>
          <table:table-cell table:formula="of:=IFERROR(VLOOKUP([.$V79];[$遺業能力番号.$A$1:$遺業能力番号.$B$9];2;0);0)" office:value-type="float" office:value="0" calcext:value-type="float">
            <text:p>0</text:p>
          </table:table-cell>
          <table:table-cell office:value-type="string" calcext:value-type="string">
            <text:p>https://one-draw.jp/ijinden/cardlist/001/card/01_039.png</text:p>
          </table:table-cell>
          <table:table-cell table:formula="of:=CONCATENATE([$JSON.$A$1];[.$C79];[$JSON.$B$1];[.$E79];[$JSON.$C$1];[.$F79];[$JSON.$D$1];IF(ISNA([.$S79]);&quot;null&quot;;&quot;&quot;&quot;&quot;&amp;[.$S79]&amp;&quot;&quot;&quot;&quot;);[$JSON.$E$1];[.$U79];[$JSON.$F$1];IF(ISNA([.$V79]);&quot;null&quot;;&quot;&quot;&quot;&quot;&amp;[.$V79]&amp;&quot;&quot;&quot;&quot;);[$JSON.$G$1];[.$X79];[$JSON.$H$1];[.$H79];[$JSON.$I$1];[.J79];[$JSON.$J$1];[.$L79];[$JSON.$K$1];[.$O79];[$JSON.$L$1];[.$N79];[$JSON.$M$1];[.$R79];[$JSON.$N$1];[.$T79];[$JSON.$O$1];[.$W79];[$JSON.$P$1];[.$A79];[$JSON.$Q$1];[.$B79];[$JSON.$R$1])" office:value-type="string" office:string-value="{&quot;id&quot;:&quot;1-39&quot;,&quot;name&quot;:&quot;ヨハン・ゼバスティアン・バッハ&quot;,&quot;kana&quot;:&quot;よはんぜばすてぃあんばっは&quot;,&quot;traitText&quot;:&quot;音楽&quot;,&quot;ruleText&quot;:&quot;これが戦場にいる間、戦場のイジンとハイケイは「特性：音楽」を得る。&quot;,&quot;legacyText&quot;:null,&quot;imageUrl&quot;:&quot;https://one-draw.jp/ijinden/cardlist/001/card/01_039.png&quot;,&quot;expansion&quot;:15,&quot;rarity&quot;:1,&quot;type&quot;:1,&quot;level&quot;:4,&quot;color&quot;:4,&quot;term&quot;:0,&quot;trait&quot;:4,&quot;legacy&quot;:0,&quot;orderTable&quot;:78,&quot;orderDeck&quot;:127}," calcext:value-type="string">
            <text:p>{"id":"1-39","name":"ヨハン・ゼバスティアン・バッハ","kana":"よはんぜばすてぃあんばっは","traitText":"音楽","ruleText":"これが戦場にいる間、戦場のイジンとハイケイは「特性：音楽」を得る。","legacyText":null,"imageUrl":"https://one-draw.jp/ijinden/cardlist/001/card/01_039.png","expansion":15,"rarity":1,"type":1,"level":4,"color":4,"term":0,"trait":4,"legacy":0,"orderTable":78,"orderDeck":127},</text:p>
          </table:table-cell>
          <table:table-cell table:number-columns-repeated="16347"/>
        </table:table-row>
        <table:table-row table:style-name="ro2">
          <table:table-cell office:value-type="float" office:value="79" calcext:value-type="float">
            <text:p>79</text:p>
          </table:table-cell>
          <table:table-cell office:value-type="float" office:value="164" calcext:value-type="float">
            <text:p>164</text:p>
          </table:table-cell>
          <table:table-cell office:value-type="string" calcext:value-type="string">
            <text:p>1-40</text:p>
          </table:table-cell>
          <table:table-cell office:value-type="float" office:value="40" calcext:value-type="float">
            <text:p>40</text:p>
          </table:table-cell>
          <table:table-cell office:value-type="string" calcext:value-type="string">
            <text:p>大伴家持</text:p>
          </table:table-cell>
          <table:table-cell office:value-type="string" calcext:value-type="string">
            <text:p>おおとものやかもち</text:p>
          </table:table-cell>
          <table:table-cell office:value-type="string" calcext:value-type="string">
            <text:p>第１弾ブースターパック</text:p>
          </table:table-cell>
          <table:table-cell table:formula="of:=VLOOKUP([.G80];[$収録番号.$A$1:$収録番号.$B$9];2;0)" office:value-type="float" office:value="15" calcext:value-type="float">
            <text:p>15</text:p>
          </table:table-cell>
          <table:table-cell office:value-type="string" calcext:value-type="string">
            <text:p>R</text:p>
          </table:table-cell>
          <table:table-cell table:formula="of:=VLOOKUP([.I80];[$レアリティ番号.$A$1:$レアリティ番号.$B$4];2;0)" office:value-type="float" office:value="2" calcext:value-type="float">
            <text:p>2</text:p>
          </table:table-cell>
          <table:table-cell office:value-type="string" calcext:value-type="string">
            <text:p>イジン</text:p>
          </table:table-cell>
          <table:table-cell table:formula="of:=VLOOKUP([.K80];[$種類番号.$A$1:$種類番号.$B$4];2;0)" office:value-type="float" office:value="1" calcext:value-type="float">
            <text:p>1</text:p>
          </table:table-cell>
          <table:table-cell office:value-type="string" calcext:value-type="string">
            <text:p>緑</text:p>
          </table:table-cell>
          <table:table-cell table:formula="of:=VLOOKUP([.M80];[$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執筆</text:p>
          </table:table-cell>
          <table:table-cell table:formula="of:=IFERROR(VLOOKUP([.$Q80];[$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80];[$特性番号.$A$1:$特性番号.$B$8];2;0);0)" office:value-type="float" office:value="0" calcext:value-type="float">
            <text:p>0</text:p>
          </table:table-cell>
          <table:table-cell office:value-type="string" calcext:value-type="string">
            <text:p>執筆 - ハイケイが戦場に置かれるたび、1ドローする。¶自分の戦場のハイケイ1つにつき「パワー+1000」を得る。</text:p>
          </table:table-cell>
          <table:table-cell table:style-name="ce8" table:formula="of:=NA()" office:value-type="string" office:string-value="" calcext:value-type="error">
            <text:p>#N/A</text:p>
          </table:table-cell>
          <table:table-cell table:formula="of:=IFERROR(VLOOKUP([.$V80];[$遺業能力番号.$A$1:$遺業能力番号.$B$9];2;0);0)" office:value-type="float" office:value="0" calcext:value-type="float">
            <text:p>0</text:p>
          </table:table-cell>
          <table:table-cell office:value-type="string" calcext:value-type="string">
            <text:p>https://one-draw.jp/ijinden/cardlist/001/card/01_040.png</text:p>
          </table:table-cell>
          <table:table-cell table:formula="of:=CONCATENATE([$JSON.$A$1];[.$C80];[$JSON.$B$1];[.$E80];[$JSON.$C$1];[.$F80];[$JSON.$D$1];IF(ISNA([.$S80]);&quot;null&quot;;&quot;&quot;&quot;&quot;&amp;[.$S80]&amp;&quot;&quot;&quot;&quot;);[$JSON.$E$1];[.$U80];[$JSON.$F$1];IF(ISNA([.$V80]);&quot;null&quot;;&quot;&quot;&quot;&quot;&amp;[.$V80]&amp;&quot;&quot;&quot;&quot;);[$JSON.$G$1];[.$X80];[$JSON.$H$1];[.$H80];[$JSON.$I$1];[.J80];[$JSON.$J$1];[.$L80];[$JSON.$K$1];[.$O80];[$JSON.$L$1];[.$N80];[$JSON.$M$1];[.$R80];[$JSON.$N$1];[.$T80];[$JSON.$O$1];[.$W80];[$JSON.$P$1];[.$A80];[$JSON.$Q$1];[.$B80];[$JSON.$R$1])" office:value-type="string" office:string-value="{&quot;id&quot;:&quot;1-40&quot;,&quot;name&quot;:&quot;大伴家持&quot;,&quot;kana&quot;:&quot;おおとものやかもち&quot;,&quot;traitText&quot;:null,&quot;ruleText&quot;:&quot;執筆 - ハイケイが戦場に置かれるたび、1ドローする。¶自分の戦場のハイケイ1つにつき「パワー+1000」を得る。&quot;,&quot;legacyText&quot;:null,&quot;imageUrl&quot;:&quot;https://one-draw.jp/ijinden/cardlist/001/card/01_040.png&quot;,&quot;expansion&quot;:15,&quot;rarity&quot;:2,&quot;type&quot;:1,&quot;level&quot;:5,&quot;color&quot;:4,&quot;term&quot;:2,&quot;trait&quot;:0,&quot;legacy&quot;:0,&quot;orderTable&quot;:79,&quot;orderDeck&quot;:164}," calcext:value-type="string">
            <text:p>{"id":"1-40","name":"大伴家持","kana":"おおとものやかもち","traitText":null,"ruleText":"執筆 - ハイケイが戦場に置かれるたび、1ドローする。¶自分の戦場のハイケイ1つにつき「パワー+1000」を得る。","legacyText":null,"imageUrl":"https://one-draw.jp/ijinden/cardlist/001/card/01_040.png","expansion":15,"rarity":2,"type":1,"level":5,"color":4,"term":2,"trait":0,"legacy":0,"orderTable":79,"orderDeck":164},</text:p>
          </table:table-cell>
          <table:table-cell table:number-columns-repeated="16347"/>
        </table:table-row>
        <table:table-row table:style-name="ro2">
          <table:table-cell office:value-type="float" office:value="80" calcext:value-type="float">
            <text:p>80</text:p>
          </table:table-cell>
          <table:table-cell office:value-type="float" office:value="165" calcext:value-type="float">
            <text:p>165</text:p>
          </table:table-cell>
          <table:table-cell office:value-type="string" calcext:value-type="string">
            <text:p>1-41</text:p>
          </table:table-cell>
          <table:table-cell office:value-type="float" office:value="41" calcext:value-type="float">
            <text:p>41</text:p>
          </table:table-cell>
          <table:table-cell office:value-type="string" calcext:value-type="string">
            <text:p>フランツ・ペーター・シューベルト</text:p>
          </table:table-cell>
          <table:table-cell office:value-type="string" calcext:value-type="string">
            <text:p>ふらんつぺーたーしゅーべると</text:p>
          </table:table-cell>
          <table:table-cell office:value-type="string" calcext:value-type="string">
            <text:p>第１弾ブースターパック</text:p>
          </table:table-cell>
          <table:table-cell table:formula="of:=VLOOKUP([.G81];[$収録番号.$A$1:$収録番号.$B$9];2;0)" office:value-type="float" office:value="15" calcext:value-type="float">
            <text:p>15</text:p>
          </table:table-cell>
          <table:table-cell office:value-type="string" calcext:value-type="string">
            <text:p>N</text:p>
          </table:table-cell>
          <table:table-cell table:formula="of:=VLOOKUP([.I81];[$レアリティ番号.$A$1:$レアリティ番号.$B$4];2;0)" office:value-type="float" office:value="1" calcext:value-type="float">
            <text:p>1</text:p>
          </table:table-cell>
          <table:table-cell office:value-type="string" calcext:value-type="string">
            <text:p>イジン</text:p>
          </table:table-cell>
          <table:table-cell table:formula="of:=VLOOKUP([.K81];[$種類番号.$A$1:$種類番号.$B$4];2;0)" office:value-type="float" office:value="1" calcext:value-type="float">
            <text:p>1</text:p>
          </table:table-cell>
          <table:table-cell office:value-type="string" calcext:value-type="string">
            <text:p>緑</text:p>
          </table:table-cell>
          <table:table-cell table:formula="of:=VLOOKUP([.M81];[$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81];[$能力語番号.$A$1:$能力語番号.$B$10];2;0);0)" office:value-type="float" office:value="0" calcext:value-type="float">
            <text:p>0</text:p>
          </table:table-cell>
          <table:table-cell office:value-type="string" calcext:value-type="string">
            <text:p>音楽</text:p>
          </table:table-cell>
          <table:table-cell table:formula="of:=IFERROR(VLOOKUP([.$S81];[$特性番号.$A$1:$特性番号.$B$8];2;0);0)" office:value-type="float" office:value="4" calcext:value-type="float">
            <text:p>4</text:p>
          </table:table-cell>
          <table:table-cell office:value-type="string" calcext:value-type="string">
            <text:p>戦場に名前の異なる「音楽」カードが2つ以上ある間、相手は墓地のカードを戦場に置くことができない。</text:p>
          </table:table-cell>
          <table:table-cell table:style-name="ce8" table:formula="of:=NA()" office:value-type="string" office:string-value="" calcext:value-type="error">
            <text:p>#N/A</text:p>
          </table:table-cell>
          <table:table-cell table:formula="of:=IFERROR(VLOOKUP([.$V81];[$遺業能力番号.$A$1:$遺業能力番号.$B$9];2;0);0)" office:value-type="float" office:value="0" calcext:value-type="float">
            <text:p>0</text:p>
          </table:table-cell>
          <table:table-cell office:value-type="string" calcext:value-type="string">
            <text:p>https://one-draw.jp/ijinden/cardlist/001/card/01_041.png</text:p>
          </table:table-cell>
          <table:table-cell table:formula="of:=CONCATENATE([$JSON.$A$1];[.$C81];[$JSON.$B$1];[.$E81];[$JSON.$C$1];[.$F81];[$JSON.$D$1];IF(ISNA([.$S81]);&quot;null&quot;;&quot;&quot;&quot;&quot;&amp;[.$S81]&amp;&quot;&quot;&quot;&quot;);[$JSON.$E$1];[.$U81];[$JSON.$F$1];IF(ISNA([.$V81]);&quot;null&quot;;&quot;&quot;&quot;&quot;&amp;[.$V81]&amp;&quot;&quot;&quot;&quot;);[$JSON.$G$1];[.$X81];[$JSON.$H$1];[.$H81];[$JSON.$I$1];[.J81];[$JSON.$J$1];[.$L81];[$JSON.$K$1];[.$O81];[$JSON.$L$1];[.$N81];[$JSON.$M$1];[.$R81];[$JSON.$N$1];[.$T81];[$JSON.$O$1];[.$W81];[$JSON.$P$1];[.$A81];[$JSON.$Q$1];[.$B81];[$JSON.$R$1])" office:value-type="string" office:string-value="{&quot;id&quot;:&quot;1-41&quot;,&quot;name&quot;:&quot;フランツ・ペーター・シューベルト&quot;,&quot;kana&quot;:&quot;ふらんつぺーたーしゅーべると&quot;,&quot;traitText&quot;:&quot;音楽&quot;,&quot;ruleText&quot;:&quot;戦場に名前の異なる「音楽」カードが2つ以上ある間、相手は墓地のカードを戦場に置くことができない。&quot;,&quot;legacyText&quot;:null,&quot;imageUrl&quot;:&quot;https://one-draw.jp/ijinden/cardlist/001/card/01_041.png&quot;,&quot;expansion&quot;:15,&quot;rarity&quot;:1,&quot;type&quot;:1,&quot;level&quot;:5,&quot;color&quot;:4,&quot;term&quot;:0,&quot;trait&quot;:4,&quot;legacy&quot;:0,&quot;orderTable&quot;:80,&quot;orderDeck&quot;:165}," calcext:value-type="string">
            <text:p>{"id":"1-41","name":"フランツ・ペーター・シューベルト","kana":"ふらんつぺーたーしゅーべると","traitText":"音楽","ruleText":"戦場に名前の異なる「音楽」カードが2つ以上ある間、相手は墓地のカードを戦場に置くことができない。","legacyText":null,"imageUrl":"https://one-draw.jp/ijinden/cardlist/001/card/01_041.png","expansion":15,"rarity":1,"type":1,"level":5,"color":4,"term":0,"trait":4,"legacy":0,"orderTable":80,"orderDeck":165},</text:p>
          </table:table-cell>
          <table:table-cell table:number-columns-repeated="16347"/>
        </table:table-row>
        <table:table-row table:style-name="ro2">
          <table:table-cell office:value-type="float" office:value="81" calcext:value-type="float">
            <text:p>81</text:p>
          </table:table-cell>
          <table:table-cell office:value-type="float" office:value="190" calcext:value-type="float">
            <text:p>190</text:p>
          </table:table-cell>
          <table:table-cell office:value-type="string" calcext:value-type="string">
            <text:p>1-42</text:p>
          </table:table-cell>
          <table:table-cell office:value-type="float" office:value="42" calcext:value-type="float">
            <text:p>42</text:p>
          </table:table-cell>
          <table:table-cell office:value-type="string" calcext:value-type="string">
            <text:p>空海</text:p>
          </table:table-cell>
          <table:table-cell office:value-type="string" calcext:value-type="string">
            <text:p>くうかい</text:p>
          </table:table-cell>
          <table:table-cell office:value-type="string" calcext:value-type="string">
            <text:p>第１弾ブースターパック</text:p>
          </table:table-cell>
          <table:table-cell table:formula="of:=VLOOKUP([.G82];[$収録番号.$A$1:$収録番号.$B$9];2;0)" office:value-type="float" office:value="15" calcext:value-type="float">
            <text:p>15</text:p>
          </table:table-cell>
          <table:table-cell office:value-type="string" calcext:value-type="string">
            <text:p>N</text:p>
          </table:table-cell>
          <table:table-cell table:formula="of:=VLOOKUP([.I82];[$レアリティ番号.$A$1:$レアリティ番号.$B$4];2;0)" office:value-type="float" office:value="1" calcext:value-type="float">
            <text:p>1</text:p>
          </table:table-cell>
          <table:table-cell office:value-type="string" calcext:value-type="string">
            <text:p>イジン</text:p>
          </table:table-cell>
          <table:table-cell table:formula="of:=VLOOKUP([.K82];[$種類番号.$A$1:$種類番号.$B$4];2;0)" office:value-type="float" office:value="1" calcext:value-type="float">
            <text:p>1</text:p>
          </table:table-cell>
          <table:table-cell office:value-type="string" calcext:value-type="string">
            <text:p>緑</text:p>
          </table:table-cell>
          <table:table-cell table:formula="of:=VLOOKUP([.M82];[$色番号.$A$1:$色番号.$B$10];2;0)" office:value-type="float" office:value="4" calcext:value-type="float">
            <text:p>4</text:p>
          </table:table-cell>
          <table:table-cell office:value-type="float" office:value="6" calcext:value-type="float">
            <text:p>6</text:p>
          </table:table-cell>
          <table:table-cell table:formula="of:=NA()" office:value-type="string" office:string-value="" calcext:value-type="error">
            <text:p>#N/A</text:p>
          </table:table-cell>
          <table:table-cell office:value-type="string" calcext:value-type="string">
            <text:p>航海</text:p>
          </table:table-cell>
          <table:table-cell table:formula="of:=IFERROR(VLOOKUP([.$Q82];[$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82];[$特性番号.$A$1:$特性番号.$B$8];2;0);0)" office:value-type="float" office:value="0" calcext:value-type="float">
            <text:p>0</text:p>
          </table:table-cell>
          <table:table-cell office:value-type="string" calcext:value-type="string">
            <text:p>航海 - アタッカーになったとき、自分の戦場のハイケイ1つを指定して発動できる。そのハイケイを手札に戻して、このターンの間「ダブルプレッシャー」を得る。</text:p>
          </table:table-cell>
          <table:table-cell table:style-name="ce8" office:value-type="string" calcext:value-type="string">
            <text:p>魔力化</text:p>
          </table:table-cell>
          <table:table-cell table:formula="of:=IFERROR(VLOOKUP([.$V82];[$遺業能力番号.$A$1:$遺業能力番号.$B$9];2;0);0)" office:value-type="float" office:value="1" calcext:value-type="float">
            <text:p>1</text:p>
          </table:table-cell>
          <table:table-cell office:value-type="string" calcext:value-type="string">
            <text:p>https://one-draw.jp/ijinden/cardlist/001/card/01_042.png</text:p>
          </table:table-cell>
          <table:table-cell table:formula="of:=CONCATENATE([$JSON.$A$1];[.$C82];[$JSON.$B$1];[.$E82];[$JSON.$C$1];[.$F82];[$JSON.$D$1];IF(ISNA([.$S82]);&quot;null&quot;;&quot;&quot;&quot;&quot;&amp;[.$S82]&amp;&quot;&quot;&quot;&quot;);[$JSON.$E$1];[.$U82];[$JSON.$F$1];IF(ISNA([.$V82]);&quot;null&quot;;&quot;&quot;&quot;&quot;&amp;[.$V82]&amp;&quot;&quot;&quot;&quot;);[$JSON.$G$1];[.$X82];[$JSON.$H$1];[.$H82];[$JSON.$I$1];[.J82];[$JSON.$J$1];[.$L82];[$JSON.$K$1];[.$O82];[$JSON.$L$1];[.$N82];[$JSON.$M$1];[.$R82];[$JSON.$N$1];[.$T82];[$JSON.$O$1];[.$W82];[$JSON.$P$1];[.$A82];[$JSON.$Q$1];[.$B82];[$JSON.$R$1])" office:value-type="string" office:string-value="{&quot;id&quot;:&quot;1-42&quot;,&quot;name&quot;:&quot;空海&quot;,&quot;kana&quot;:&quot;くうかい&quot;,&quot;traitText&quot;:null,&quot;ruleText&quot;:&quot;航海 - アタッカーになったとき、自分の戦場のハイケイ1つを指定して発動できる。そのハイケイを手札に戻して、このターンの間「ダブルプレッシャー」を得る。&quot;,&quot;legacyText&quot;:&quot;魔力化&quot;,&quot;imageUrl&quot;:&quot;https://one-draw.jp/ijinden/cardlist/001/card/01_042.png&quot;,&quot;expansion&quot;:15,&quot;rarity&quot;:1,&quot;type&quot;:1,&quot;level&quot;:6,&quot;color&quot;:4,&quot;term&quot;:1,&quot;trait&quot;:0,&quot;legacy&quot;:1,&quot;orderTable&quot;:81,&quot;orderDeck&quot;:190}," calcext:value-type="string">
            <text:p>{"id":"1-42","name":"空海","kana":"くうかい","traitText":null,"ruleText":"航海 - アタッカーになったとき、自分の戦場のハイケイ1つを指定して発動できる。そのハイケイを手札に戻して、このターンの間「ダブルプレッシャー」を得る。","legacyText":"魔力化","imageUrl":"https://one-draw.jp/ijinden/cardlist/001/card/01_042.png","expansion":15,"rarity":1,"type":1,"level":6,"color":4,"term":1,"trait":0,"legacy":1,"orderTable":81,"orderDeck":190},</text:p>
          </table:table-cell>
          <table:table-cell table:number-columns-repeated="16347"/>
        </table:table-row>
        <table:table-row table:style-name="ro2">
          <table:table-cell office:value-type="float" office:value="82" calcext:value-type="float">
            <text:p>82</text:p>
          </table:table-cell>
          <table:table-cell office:value-type="float" office:value="191" calcext:value-type="float">
            <text:p>191</text:p>
          </table:table-cell>
          <table:table-cell office:value-type="string" calcext:value-type="string">
            <text:p>1-43</text:p>
          </table:table-cell>
          <table:table-cell office:value-type="float" office:value="43" calcext:value-type="float">
            <text:p>43</text:p>
          </table:table-cell>
          <table:table-cell office:value-type="string" calcext:value-type="string">
            <text:p>清少納言</text:p>
          </table:table-cell>
          <table:table-cell office:value-type="string" calcext:value-type="string">
            <text:p>せいしょうなごん</text:p>
          </table:table-cell>
          <table:table-cell office:value-type="string" calcext:value-type="string">
            <text:p>第１弾ブースターパック</text:p>
          </table:table-cell>
          <table:table-cell table:formula="of:=VLOOKUP([.G83];[$収録番号.$A$1:$収録番号.$B$9];2;0)" office:value-type="float" office:value="15" calcext:value-type="float">
            <text:p>15</text:p>
          </table:table-cell>
          <table:table-cell office:value-type="string" calcext:value-type="string">
            <text:p>N</text:p>
          </table:table-cell>
          <table:table-cell table:formula="of:=VLOOKUP([.I83];[$レアリティ番号.$A$1:$レアリティ番号.$B$4];2;0)" office:value-type="float" office:value="1" calcext:value-type="float">
            <text:p>1</text:p>
          </table:table-cell>
          <table:table-cell office:value-type="string" calcext:value-type="string">
            <text:p>イジン</text:p>
          </table:table-cell>
          <table:table-cell table:formula="of:=VLOOKUP([.K83];[$種類番号.$A$1:$種類番号.$B$4];2;0)" office:value-type="float" office:value="1" calcext:value-type="float">
            <text:p>1</text:p>
          </table:table-cell>
          <table:table-cell office:value-type="string" calcext:value-type="string">
            <text:p>緑</text:p>
          </table:table-cell>
          <table:table-cell table:formula="of:=VLOOKUP([.M83];[$色番号.$A$1:$色番号.$B$10];2;0)" office:value-type="float" office:value="4" calcext:value-type="float">
            <text:p>4</text:p>
          </table:table-cell>
          <table:table-cell office:value-type="float" office:value="6" calcext:value-type="float">
            <text:p>6</text:p>
          </table:table-cell>
          <table:table-cell table:formula="of:=NA()" office:value-type="string" office:string-value="" calcext:value-type="error">
            <text:p>#N/A</text:p>
          </table:table-cell>
          <table:table-cell office:value-type="string" calcext:value-type="string">
            <text:p>執筆</text:p>
          </table:table-cell>
          <table:table-cell table:formula="of:=IFERROR(VLOOKUP([.$Q83];[$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83];[$特性番号.$A$1:$特性番号.$B$8];2;0);0)" office:value-type="float" office:value="0" calcext:value-type="float">
            <text:p>0</text:p>
          </table:table-cell>
          <table:table-cell office:value-type="string" calcext:value-type="string">
            <text:p>戦場に置かれたとき、自分の魔力ゾーンのマリョクと同じ色を持つ戦場のイジン1体を指定して発動できる。そのイジンを裏にして魔力ゾーンに置く。¶執筆 - ハイケイが戦場に置かれるたび、魔力ゾーンのカード1つを指定して発動できる。そのカードを手札に戻す。</text:p>
          </table:table-cell>
          <table:table-cell table:style-name="ce8" table:formula="of:=NA()" office:value-type="string" office:string-value="" calcext:value-type="error">
            <text:p>#N/A</text:p>
          </table:table-cell>
          <table:table-cell table:formula="of:=IFERROR(VLOOKUP([.$V83];[$遺業能力番号.$A$1:$遺業能力番号.$B$9];2;0);0)" office:value-type="float" office:value="0" calcext:value-type="float">
            <text:p>0</text:p>
          </table:table-cell>
          <table:table-cell office:value-type="string" calcext:value-type="string">
            <text:p>https://one-draw.jp/ijinden/cardlist/001/card/01_043.png</text:p>
          </table:table-cell>
          <table:table-cell table:formula="of:=CONCATENATE([$JSON.$A$1];[.$C83];[$JSON.$B$1];[.$E83];[$JSON.$C$1];[.$F83];[$JSON.$D$1];IF(ISNA([.$S83]);&quot;null&quot;;&quot;&quot;&quot;&quot;&amp;[.$S83]&amp;&quot;&quot;&quot;&quot;);[$JSON.$E$1];[.$U83];[$JSON.$F$1];IF(ISNA([.$V83]);&quot;null&quot;;&quot;&quot;&quot;&quot;&amp;[.$V83]&amp;&quot;&quot;&quot;&quot;);[$JSON.$G$1];[.$X83];[$JSON.$H$1];[.$H83];[$JSON.$I$1];[.J83];[$JSON.$J$1];[.$L83];[$JSON.$K$1];[.$O83];[$JSON.$L$1];[.$N83];[$JSON.$M$1];[.$R83];[$JSON.$N$1];[.$T83];[$JSON.$O$1];[.$W83];[$JSON.$P$1];[.$A83];[$JSON.$Q$1];[.$B83];[$JSON.$R$1])" office:value-type="string" office:string-value="{&quot;id&quot;:&quot;1-43&quot;,&quot;name&quot;:&quot;清少納言&quot;,&quot;kana&quot;:&quot;せいしょうなごん&quot;,&quot;traitText&quot;:null,&quot;ruleText&quot;:&quot;戦場に置かれたとき、自分の魔力ゾーンのマリョクと同じ色を持つ戦場のイジン1体を指定して発動できる。そのイジンを裏にして魔力ゾーンに置く。¶執筆 - ハイケイが戦場に置かれるたび、魔力ゾーンのカード1つを指定して発動できる。そのカードを手札に戻す。&quot;,&quot;legacyText&quot;:null,&quot;imageUrl&quot;:&quot;https://one-draw.jp/ijinden/cardlist/001/card/01_043.png&quot;,&quot;expansion&quot;:15,&quot;rarity&quot;:1,&quot;type&quot;:1,&quot;level&quot;:6,&quot;color&quot;:4,&quot;term&quot;:2,&quot;trait&quot;:0,&quot;legacy&quot;:0,&quot;orderTable&quot;:82,&quot;orderDeck&quot;:191}," calcext:value-type="string">
            <text:p>{"id":"1-43","name":"清少納言","kana":"せいしょうなごん","traitText":null,"ruleText":"戦場に置かれたとき、自分の魔力ゾーンのマリョクと同じ色を持つ戦場のイジン1体を指定して発動できる。そのイジンを裏にして魔力ゾーンに置く。¶執筆 - ハイケイが戦場に置かれるたび、魔力ゾーンのカード1つを指定して発動できる。そのカードを手札に戻す。","legacyText":null,"imageUrl":"https://one-draw.jp/ijinden/cardlist/001/card/01_043.png","expansion":15,"rarity":1,"type":1,"level":6,"color":4,"term":2,"trait":0,"legacy":0,"orderTable":82,"orderDeck":191},</text:p>
          </table:table-cell>
          <table:table-cell table:number-columns-repeated="16347"/>
        </table:table-row>
        <table:table-row table:style-name="ro2">
          <table:table-cell office:value-type="float" office:value="83" calcext:value-type="float">
            <text:p>83</text:p>
          </table:table-cell>
          <table:table-cell office:value-type="float" office:value="192" calcext:value-type="float">
            <text:p>192</text:p>
          </table:table-cell>
          <table:table-cell office:value-type="string" calcext:value-type="string">
            <text:p>1-44</text:p>
          </table:table-cell>
          <table:table-cell office:value-type="float" office:value="44" calcext:value-type="float">
            <text:p>44</text:p>
          </table:table-cell>
          <table:table-cell office:value-type="string" calcext:value-type="string">
            <text:p>ルートヴィヒ・ヴァン・ベートーヴェン</text:p>
          </table:table-cell>
          <table:table-cell office:value-type="string" calcext:value-type="string">
            <text:p>るーとゔぃひゔぁんべーとーゔぇん</text:p>
          </table:table-cell>
          <table:table-cell office:value-type="string" calcext:value-type="string">
            <text:p>第１弾ブースターパック</text:p>
          </table:table-cell>
          <table:table-cell table:formula="of:=VLOOKUP([.G84];[$収録番号.$A$1:$収録番号.$B$9];2;0)" office:value-type="float" office:value="15" calcext:value-type="float">
            <text:p>15</text:p>
          </table:table-cell>
          <table:table-cell office:value-type="string" calcext:value-type="string">
            <text:p>N</text:p>
          </table:table-cell>
          <table:table-cell table:formula="of:=VLOOKUP([.I84];[$レアリティ番号.$A$1:$レアリティ番号.$B$4];2;0)" office:value-type="float" office:value="1" calcext:value-type="float">
            <text:p>1</text:p>
          </table:table-cell>
          <table:table-cell office:value-type="string" calcext:value-type="string">
            <text:p>イジン</text:p>
          </table:table-cell>
          <table:table-cell table:formula="of:=VLOOKUP([.K84];[$種類番号.$A$1:$種類番号.$B$4];2;0)" office:value-type="float" office:value="1" calcext:value-type="float">
            <text:p>1</text:p>
          </table:table-cell>
          <table:table-cell office:value-type="string" calcext:value-type="string">
            <text:p>緑</text:p>
          </table:table-cell>
          <table:table-cell table:formula="of:=VLOOKUP([.M84];[$色番号.$A$1:$色番号.$B$10];2;0)" office:value-type="float" office:value="4" calcext:value-type="float">
            <text:p>4</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84];[$能力語番号.$A$1:$能力語番号.$B$10];2;0);0)" office:value-type="float" office:value="0" calcext:value-type="float">
            <text:p>0</text:p>
          </table:table-cell>
          <table:table-cell office:value-type="string" calcext:value-type="string">
            <text:p>音楽</text:p>
          </table:table-cell>
          <table:table-cell table:formula="of:=IFERROR(VLOOKUP([.$S84];[$特性番号.$A$1:$特性番号.$B$8];2;0);0)" office:value-type="float" office:value="4" calcext:value-type="float">
            <text:p>4</text:p>
          </table:table-cell>
          <table:table-cell office:value-type="string" calcext:value-type="string">
            <text:p>戦場に名前の異なる「音楽」カードが3つ以上ある間、相手は墓地のカードを手札に戻すことができない。</text:p>
          </table:table-cell>
          <table:table-cell table:style-name="ce8" table:formula="of:=NA()" office:value-type="string" office:string-value="" calcext:value-type="error">
            <text:p>#N/A</text:p>
          </table:table-cell>
          <table:table-cell table:formula="of:=IFERROR(VLOOKUP([.$V84];[$遺業能力番号.$A$1:$遺業能力番号.$B$9];2;0);0)" office:value-type="float" office:value="0" calcext:value-type="float">
            <text:p>0</text:p>
          </table:table-cell>
          <table:table-cell office:value-type="string" calcext:value-type="string">
            <text:p>https://one-draw.jp/ijinden/cardlist/001/card/01_044.png</text:p>
          </table:table-cell>
          <table:table-cell table:formula="of:=CONCATENATE([$JSON.$A$1];[.$C84];[$JSON.$B$1];[.$E84];[$JSON.$C$1];[.$F84];[$JSON.$D$1];IF(ISNA([.$S84]);&quot;null&quot;;&quot;&quot;&quot;&quot;&amp;[.$S84]&amp;&quot;&quot;&quot;&quot;);[$JSON.$E$1];[.$U84];[$JSON.$F$1];IF(ISNA([.$V84]);&quot;null&quot;;&quot;&quot;&quot;&quot;&amp;[.$V84]&amp;&quot;&quot;&quot;&quot;);[$JSON.$G$1];[.$X84];[$JSON.$H$1];[.$H84];[$JSON.$I$1];[.J84];[$JSON.$J$1];[.$L84];[$JSON.$K$1];[.$O84];[$JSON.$L$1];[.$N84];[$JSON.$M$1];[.$R84];[$JSON.$N$1];[.$T84];[$JSON.$O$1];[.$W84];[$JSON.$P$1];[.$A84];[$JSON.$Q$1];[.$B84];[$JSON.$R$1])" office:value-type="string" office:string-value="{&quot;id&quot;:&quot;1-44&quot;,&quot;name&quot;:&quot;ルートヴィヒ・ヴァン・ベートーヴェン&quot;,&quot;kana&quot;:&quot;るーとゔぃひゔぁんべーとーゔぇん&quot;,&quot;traitText&quot;:&quot;音楽&quot;,&quot;ruleText&quot;:&quot;戦場に名前の異なる「音楽」カードが3つ以上ある間、相手は墓地のカードを手札に戻すことができない。&quot;,&quot;legacyText&quot;:null,&quot;imageUrl&quot;:&quot;https://one-draw.jp/ijinden/cardlist/001/card/01_044.png&quot;,&quot;expansion&quot;:15,&quot;rarity&quot;:1,&quot;type&quot;:1,&quot;level&quot;:6,&quot;color&quot;:4,&quot;term&quot;:0,&quot;trait&quot;:4,&quot;legacy&quot;:0,&quot;orderTable&quot;:83,&quot;orderDeck&quot;:192}," calcext:value-type="string">
            <text:p>{"id":"1-44","name":"ルートヴィヒ・ヴァン・ベートーヴェン","kana":"るーとゔぃひゔぁんべーとーゔぇん","traitText":"音楽","ruleText":"戦場に名前の異なる「音楽」カードが3つ以上ある間、相手は墓地のカードを手札に戻すことができない。","legacyText":null,"imageUrl":"https://one-draw.jp/ijinden/cardlist/001/card/01_044.png","expansion":15,"rarity":1,"type":1,"level":6,"color":4,"term":0,"trait":4,"legacy":0,"orderTable":83,"orderDeck":192},</text:p>
          </table:table-cell>
          <table:table-cell table:number-columns-repeated="16347"/>
        </table:table-row>
        <table:table-row table:style-name="ro2">
          <table:table-cell office:value-type="float" office:value="84" calcext:value-type="float">
            <text:p>84</text:p>
          </table:table-cell>
          <table:table-cell office:value-type="float" office:value="209" calcext:value-type="float">
            <text:p>209</text:p>
          </table:table-cell>
          <table:table-cell office:value-type="string" calcext:value-type="string">
            <text:p>1-45</text:p>
          </table:table-cell>
          <table:table-cell office:value-type="float" office:value="45" calcext:value-type="float">
            <text:p>45</text:p>
          </table:table-cell>
          <table:table-cell office:value-type="string" calcext:value-type="string">
            <text:p>行基</text:p>
          </table:table-cell>
          <table:table-cell office:value-type="string" calcext:value-type="string">
            <text:p>ぎょうき</text:p>
          </table:table-cell>
          <table:table-cell office:value-type="string" calcext:value-type="string">
            <text:p>第１弾ブースターパック</text:p>
          </table:table-cell>
          <table:table-cell table:formula="of:=VLOOKUP([.G85];[$収録番号.$A$1:$収録番号.$B$9];2;0)" office:value-type="float" office:value="15" calcext:value-type="float">
            <text:p>15</text:p>
          </table:table-cell>
          <table:table-cell office:value-type="string" calcext:value-type="string">
            <text:p>R</text:p>
          </table:table-cell>
          <table:table-cell table:formula="of:=VLOOKUP([.I85];[$レアリティ番号.$A$1:$レアリティ番号.$B$4];2;0)" office:value-type="float" office:value="2" calcext:value-type="float">
            <text:p>2</text:p>
          </table:table-cell>
          <table:table-cell office:value-type="string" calcext:value-type="string">
            <text:p>イジン</text:p>
          </table:table-cell>
          <table:table-cell table:formula="of:=VLOOKUP([.K85];[$種類番号.$A$1:$種類番号.$B$4];2;0)" office:value-type="float" office:value="1" calcext:value-type="float">
            <text:p>1</text:p>
          </table:table-cell>
          <table:table-cell office:value-type="string" calcext:value-type="string">
            <text:p>緑</text:p>
          </table:table-cell>
          <table:table-cell table:formula="of:=VLOOKUP([.M85];[$色番号.$A$1:$色番号.$B$10];2;0)" office:value-type="float" office:value="4" calcext:value-type="float">
            <text:p>4</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8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85];[$特性番号.$A$1:$特性番号.$B$8];2;0);0)" office:value-type="float" office:value="0" calcext:value-type="float">
            <text:p>0</text:p>
          </table:table-cell>
          <table:table-cell office:value-type="string" calcext:value-type="string">
            <text:p>戦場に置かれたとき、イジン召喚権+1して、自分の戦場のハイケイ1つにつき1ドローする。¶これが戦場にいる間、自分の戦場のハイケイは破壊されない。</text:p>
          </table:table-cell>
          <table:table-cell table:style-name="ce8" office:value-type="string" calcext:value-type="string">
            <text:p>1ドローする</text:p>
          </table:table-cell>
          <table:table-cell table:formula="of:=IFERROR(VLOOKUP([.$V85];[$遺業能力番号.$A$1:$遺業能力番号.$B$9];2;0);0)" office:value-type="float" office:value="4" calcext:value-type="float">
            <text:p>4</text:p>
          </table:table-cell>
          <table:table-cell office:value-type="string" calcext:value-type="string">
            <text:p>https://one-draw.jp/ijinden/cardlist/001/card/01_045.png</text:p>
          </table:table-cell>
          <table:table-cell table:formula="of:=CONCATENATE([$JSON.$A$1];[.$C85];[$JSON.$B$1];[.$E85];[$JSON.$C$1];[.$F85];[$JSON.$D$1];IF(ISNA([.$S85]);&quot;null&quot;;&quot;&quot;&quot;&quot;&amp;[.$S85]&amp;&quot;&quot;&quot;&quot;);[$JSON.$E$1];[.$U85];[$JSON.$F$1];IF(ISNA([.$V85]);&quot;null&quot;;&quot;&quot;&quot;&quot;&amp;[.$V85]&amp;&quot;&quot;&quot;&quot;);[$JSON.$G$1];[.$X85];[$JSON.$H$1];[.$H85];[$JSON.$I$1];[.J85];[$JSON.$J$1];[.$L85];[$JSON.$K$1];[.$O85];[$JSON.$L$1];[.$N85];[$JSON.$M$1];[.$R85];[$JSON.$N$1];[.$T85];[$JSON.$O$1];[.$W85];[$JSON.$P$1];[.$A85];[$JSON.$Q$1];[.$B85];[$JSON.$R$1])" office:value-type="string" office:string-value="{&quot;id&quot;:&quot;1-45&quot;,&quot;name&quot;:&quot;行基&quot;,&quot;kana&quot;:&quot;ぎょうき&quot;,&quot;traitText&quot;:null,&quot;ruleText&quot;:&quot;戦場に置かれたとき、イジン召喚権+1して、自分の戦場のハイケイ1つにつき1ドローする。¶これが戦場にいる間、自分の戦場のハイケイは破壊されない。&quot;,&quot;legacyText&quot;:&quot;1ドローする&quot;,&quot;imageUrl&quot;:&quot;https://one-draw.jp/ijinden/cardlist/001/card/01_045.png&quot;,&quot;expansion&quot;:15,&quot;rarity&quot;:2,&quot;type&quot;:1,&quot;level&quot;:7,&quot;color&quot;:4,&quot;term&quot;:0,&quot;trait&quot;:0,&quot;legacy&quot;:4,&quot;orderTable&quot;:84,&quot;orderDeck&quot;:209}," calcext:value-type="string">
            <text:p>{"id":"1-45","name":"行基","kana":"ぎょうき","traitText":null,"ruleText":"戦場に置かれたとき、イジン召喚権+1して、自分の戦場のハイケイ1つにつき1ドローする。¶これが戦場にいる間、自分の戦場のハイケイは破壊されない。","legacyText":"1ドローする","imageUrl":"https://one-draw.jp/ijinden/cardlist/001/card/01_045.png","expansion":15,"rarity":2,"type":1,"level":7,"color":4,"term":0,"trait":0,"legacy":4,"orderTable":84,"orderDeck":209},</text:p>
          </table:table-cell>
          <table:table-cell table:number-columns-repeated="16347"/>
        </table:table-row>
        <table:table-row table:style-name="ro2">
          <table:table-cell office:value-type="float" office:value="85" calcext:value-type="float">
            <text:p>85</text:p>
          </table:table-cell>
          <table:table-cell office:value-type="float" office:value="259" calcext:value-type="float">
            <text:p>259</text:p>
          </table:table-cell>
          <table:table-cell office:value-type="string" calcext:value-type="string">
            <text:p>1-46</text:p>
          </table:table-cell>
          <table:table-cell office:value-type="float" office:value="46" calcext:value-type="float">
            <text:p>46</text:p>
          </table:table-cell>
          <table:table-cell office:value-type="string" calcext:value-type="string">
            <text:p>武者の蔵</text:p>
          </table:table-cell>
          <table:table-cell office:value-type="string" calcext:value-type="string">
            <text:p>むしゃのくら</text:p>
          </table:table-cell>
          <table:table-cell office:value-type="string" calcext:value-type="string">
            <text:p>第１弾ブースターパック</text:p>
          </table:table-cell>
          <table:table-cell table:formula="of:=VLOOKUP([.G86];[$収録番号.$A$1:$収録番号.$B$9];2;0)" office:value-type="float" office:value="15" calcext:value-type="float">
            <text:p>15</text:p>
          </table:table-cell>
          <table:table-cell office:value-type="string" calcext:value-type="string">
            <text:p>N</text:p>
          </table:table-cell>
          <table:table-cell table:formula="of:=VLOOKUP([.I86];[$レアリティ番号.$A$1:$レアリティ番号.$B$4];2;0)" office:value-type="float" office:value="1" calcext:value-type="float">
            <text:p>1</text:p>
          </table:table-cell>
          <table:table-cell office:value-type="string" calcext:value-type="string">
            <text:p>ハイケイ</text:p>
          </table:table-cell>
          <table:table-cell table:formula="of:=VLOOKUP([.K86];[$種類番号.$A$1:$種類番号.$B$4];2;0)" office:value-type="float" office:value="2" calcext:value-type="float">
            <text:p>2</text:p>
          </table:table-cell>
          <table:table-cell office:value-type="string" calcext:value-type="string">
            <text:p>赤</text:p>
          </table:table-cell>
          <table:table-cell table:formula="of:=VLOOKUP([.M86];[$色番号.$A$1:$色番号.$B$10];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8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86];[$特性番号.$A$1:$特性番号.$B$8];2;0);0)" office:value-type="float" office:value="0" calcext:value-type="float">
            <text:p>0</text:p>
          </table:table-cell>
          <table:table-cell office:value-type="string" calcext:value-type="string">
            <text:p>これが戦場にある間、自分の戦場のレベル2以下のイジンは「特性：剣術」を得る。¶これが戦場にある間、自分の戦場の「剣術」イジンは「即応」を得る。</text:p>
          </table:table-cell>
          <table:table-cell table:style-name="ce8" office:value-type="string" calcext:value-type="string">
            <text:p>魔力化</text:p>
          </table:table-cell>
          <table:table-cell table:formula="of:=IFERROR(VLOOKUP([.$V86];[$遺業能力番号.$A$1:$遺業能力番号.$B$9];2;0);0)" office:value-type="float" office:value="1" calcext:value-type="float">
            <text:p>1</text:p>
          </table:table-cell>
          <table:table-cell office:value-type="string" calcext:value-type="string">
            <text:p>https://one-draw.jp/ijinden/cardlist/001/card/01_046.png</text:p>
          </table:table-cell>
          <table:table-cell table:formula="of:=CONCATENATE([$JSON.$A$1];[.$C86];[$JSON.$B$1];[.$E86];[$JSON.$C$1];[.$F86];[$JSON.$D$1];IF(ISNA([.$S86]);&quot;null&quot;;&quot;&quot;&quot;&quot;&amp;[.$S86]&amp;&quot;&quot;&quot;&quot;);[$JSON.$E$1];[.$U86];[$JSON.$F$1];IF(ISNA([.$V86]);&quot;null&quot;;&quot;&quot;&quot;&quot;&amp;[.$V86]&amp;&quot;&quot;&quot;&quot;);[$JSON.$G$1];[.$X86];[$JSON.$H$1];[.$H86];[$JSON.$I$1];[.J86];[$JSON.$J$1];[.$L86];[$JSON.$K$1];[.$O86];[$JSON.$L$1];[.$N86];[$JSON.$M$1];[.$R86];[$JSON.$N$1];[.$T86];[$JSON.$O$1];[.$W86];[$JSON.$P$1];[.$A86];[$JSON.$Q$1];[.$B86];[$JSON.$R$1])" office:value-type="string" office:string-value="{&quot;id&quot;:&quot;1-46&quot;,&quot;name&quot;:&quot;武者の蔵&quot;,&quot;kana&quot;:&quot;むしゃのくら&quot;,&quot;traitText&quot;:null,&quot;ruleText&quot;:&quot;これが戦場にある間、自分の戦場のレベル2以下のイジンは「特性：剣術」を得る。¶これが戦場にある間、自分の戦場の「剣術」イジンは「即応」を得る。&quot;,&quot;legacyText&quot;:&quot;魔力化&quot;,&quot;imageUrl&quot;:&quot;https://one-draw.jp/ijinden/cardlist/001/card/01_046.png&quot;,&quot;expansion&quot;:15,&quot;rarity&quot;:1,&quot;type&quot;:2,&quot;level&quot;:4,&quot;color&quot;:1,&quot;term&quot;:0,&quot;trait&quot;:0,&quot;legacy&quot;:1,&quot;orderTable&quot;:85,&quot;orderDeck&quot;:259}," calcext:value-type="string">
            <text:p>{"id":"1-46","name":"武者の蔵","kana":"むしゃのくら","traitText":null,"ruleText":"これが戦場にある間、自分の戦場のレベル2以下のイジンは「特性：剣術」を得る。¶これが戦場にある間、自分の戦場の「剣術」イジンは「即応」を得る。","legacyText":"魔力化","imageUrl":"https://one-draw.jp/ijinden/cardlist/001/card/01_046.png","expansion":15,"rarity":1,"type":2,"level":4,"color":1,"term":0,"trait":0,"legacy":1,"orderTable":85,"orderDeck":259},</text:p>
          </table:table-cell>
          <table:table-cell table:number-columns-repeated="16347"/>
        </table:table-row>
        <table:table-row table:style-name="ro2">
          <table:table-cell office:value-type="float" office:value="86" calcext:value-type="float">
            <text:p>86</text:p>
          </table:table-cell>
          <table:table-cell office:value-type="float" office:value="260" calcext:value-type="float">
            <text:p>260</text:p>
          </table:table-cell>
          <table:table-cell office:value-type="string" calcext:value-type="string">
            <text:p>1-47</text:p>
          </table:table-cell>
          <table:table-cell office:value-type="float" office:value="47" calcext:value-type="float">
            <text:p>47</text:p>
          </table:table-cell>
          <table:table-cell office:value-type="string" calcext:value-type="string">
            <text:p>純白の塔</text:p>
          </table:table-cell>
          <table:table-cell office:value-type="string" calcext:value-type="string">
            <text:p>じゅんぱくのとう</text:p>
          </table:table-cell>
          <table:table-cell office:value-type="string" calcext:value-type="string">
            <text:p>第１弾ブースターパック</text:p>
          </table:table-cell>
          <table:table-cell table:formula="of:=VLOOKUP([.G87];[$収録番号.$A$1:$収録番号.$B$9];2;0)" office:value-type="float" office:value="15" calcext:value-type="float">
            <text:p>15</text:p>
          </table:table-cell>
          <table:table-cell office:value-type="string" calcext:value-type="string">
            <text:p>N</text:p>
          </table:table-cell>
          <table:table-cell table:formula="of:=VLOOKUP([.I87];[$レアリティ番号.$A$1:$レアリティ番号.$B$4];2;0)" office:value-type="float" office:value="1" calcext:value-type="float">
            <text:p>1</text:p>
          </table:table-cell>
          <table:table-cell office:value-type="string" calcext:value-type="string">
            <text:p>ハイケイ</text:p>
          </table:table-cell>
          <table:table-cell table:formula="of:=VLOOKUP([.K87];[$種類番号.$A$1:$種類番号.$B$4];2;0)" office:value-type="float" office:value="2" calcext:value-type="float">
            <text:p>2</text:p>
          </table:table-cell>
          <table:table-cell office:value-type="string" calcext:value-type="string">
            <text:p>青</text:p>
          </table:table-cell>
          <table:table-cell table:formula="of:=VLOOKUP([.M87];[$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8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87];[$特性番号.$A$1:$特性番号.$B$8];2;0);0)" office:value-type="float" office:value="0" calcext:value-type="float">
            <text:p>0</text:p>
          </table:table-cell>
          <table:table-cell office:value-type="string" calcext:value-type="string">
            <text:p>自分が3体以上でアタックしたとき、アタッカー1体を指定して発動できる。そのアタッカーは、このターンの間「イジンにブロックされない」を得る。</text:p>
          </table:table-cell>
          <table:table-cell table:style-name="ce8" office:value-type="string" calcext:value-type="string">
            <text:p>手札に戻す</text:p>
          </table:table-cell>
          <table:table-cell table:formula="of:=IFERROR(VLOOKUP([.$V87];[$遺業能力番号.$A$1:$遺業能力番号.$B$9];2;0);0)" office:value-type="float" office:value="5" calcext:value-type="float">
            <text:p>5</text:p>
          </table:table-cell>
          <table:table-cell office:value-type="string" calcext:value-type="string">
            <text:p>https://one-draw.jp/ijinden/cardlist/001/card/01_047.png</text:p>
          </table:table-cell>
          <table:table-cell table:formula="of:=CONCATENATE([$JSON.$A$1];[.$C87];[$JSON.$B$1];[.$E87];[$JSON.$C$1];[.$F87];[$JSON.$D$1];IF(ISNA([.$S87]);&quot;null&quot;;&quot;&quot;&quot;&quot;&amp;[.$S87]&amp;&quot;&quot;&quot;&quot;);[$JSON.$E$1];[.$U87];[$JSON.$F$1];IF(ISNA([.$V87]);&quot;null&quot;;&quot;&quot;&quot;&quot;&amp;[.$V87]&amp;&quot;&quot;&quot;&quot;);[$JSON.$G$1];[.$X87];[$JSON.$H$1];[.$H87];[$JSON.$I$1];[.J87];[$JSON.$J$1];[.$L87];[$JSON.$K$1];[.$O87];[$JSON.$L$1];[.$N87];[$JSON.$M$1];[.$R87];[$JSON.$N$1];[.$T87];[$JSON.$O$1];[.$W87];[$JSON.$P$1];[.$A87];[$JSON.$Q$1];[.$B87];[$JSON.$R$1])" office:value-type="string" office:string-value="{&quot;id&quot;:&quot;1-47&quot;,&quot;name&quot;:&quot;純白の塔&quot;,&quot;kana&quot;:&quot;じゅんぱくのとう&quot;,&quot;traitText&quot;:null,&quot;ruleText&quot;:&quot;自分が3体以上でアタックしたとき、アタッカー1体を指定して発動できる。そのアタッカーは、このターンの間「イジンにブロックされない」を得る。&quot;,&quot;legacyText&quot;:&quot;手札に戻す&quot;,&quot;imageUrl&quot;:&quot;https://one-draw.jp/ijinden/cardlist/001/card/01_047.png&quot;,&quot;expansion&quot;:15,&quot;rarity&quot;:1,&quot;type&quot;:2,&quot;level&quot;:4,&quot;color&quot;:2,&quot;term&quot;:0,&quot;trait&quot;:0,&quot;legacy&quot;:5,&quot;orderTable&quot;:86,&quot;orderDeck&quot;:260}," calcext:value-type="string">
            <text:p>{"id":"1-47","name":"純白の塔","kana":"じゅんぱくのとう","traitText":null,"ruleText":"自分が3体以上でアタックしたとき、アタッカー1体を指定して発動できる。そのアタッカーは、このターンの間「イジンにブロックされない」を得る。","legacyText":"手札に戻す","imageUrl":"https://one-draw.jp/ijinden/cardlist/001/card/01_047.png","expansion":15,"rarity":1,"type":2,"level":4,"color":2,"term":0,"trait":0,"legacy":5,"orderTable":86,"orderDeck":260},</text:p>
          </table:table-cell>
          <table:table-cell table:number-columns-repeated="16347"/>
        </table:table-row>
        <table:table-row table:style-name="ro2">
          <table:table-cell office:value-type="float" office:value="87" calcext:value-type="float">
            <text:p>87</text:p>
          </table:table-cell>
          <table:table-cell office:value-type="float" office:value="267" calcext:value-type="float">
            <text:p>267</text:p>
          </table:table-cell>
          <table:table-cell office:value-type="string" calcext:value-type="string">
            <text:p>1-48</text:p>
          </table:table-cell>
          <table:table-cell office:value-type="float" office:value="48" calcext:value-type="float">
            <text:p>48</text:p>
          </table:table-cell>
          <table:table-cell office:value-type="string" calcext:value-type="string">
            <text:p>円形闘技場</text:p>
          </table:table-cell>
          <table:table-cell office:value-type="string" calcext:value-type="string">
            <text:p>えんけいとうぎじょう</text:p>
          </table:table-cell>
          <table:table-cell office:value-type="string" calcext:value-type="string">
            <text:p>第１弾ブースターパック</text:p>
          </table:table-cell>
          <table:table-cell table:formula="of:=VLOOKUP([.G88];[$収録番号.$A$1:$収録番号.$B$9];2;0)" office:value-type="float" office:value="15" calcext:value-type="float">
            <text:p>15</text:p>
          </table:table-cell>
          <table:table-cell office:value-type="string" calcext:value-type="string">
            <text:p>N</text:p>
          </table:table-cell>
          <table:table-cell table:formula="of:=VLOOKUP([.I88];[$レアリティ番号.$A$1:$レアリティ番号.$B$4];2;0)" office:value-type="float" office:value="1" calcext:value-type="float">
            <text:p>1</text:p>
          </table:table-cell>
          <table:table-cell office:value-type="string" calcext:value-type="string">
            <text:p>ハイケイ</text:p>
          </table:table-cell>
          <table:table-cell table:formula="of:=VLOOKUP([.K88];[$種類番号.$A$1:$種類番号.$B$4];2;0)" office:value-type="float" office:value="2" calcext:value-type="float">
            <text:p>2</text:p>
          </table:table-cell>
          <table:table-cell office:value-type="string" calcext:value-type="string">
            <text:p>青</text:p>
          </table:table-cell>
          <table:table-cell table:formula="of:=VLOOKUP([.M88];[$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8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88];[$特性番号.$A$1:$特性番号.$B$8];2;0);0)" office:value-type="float" office:value="0" calcext:value-type="float">
            <text:p>0</text:p>
          </table:table-cell>
          <table:table-cell office:value-type="string" calcext:value-type="string">
            <text:p>自分のターンの間、自分の戦場のガーディアンは「即応」を持つパワー3000のイジンでもある。</text:p>
          </table:table-cell>
          <table:table-cell table:style-name="ce8" table:formula="of:=NA()" office:value-type="string" office:string-value="" calcext:value-type="error">
            <text:p>#N/A</text:p>
          </table:table-cell>
          <table:table-cell table:formula="of:=IFERROR(VLOOKUP([.$V88];[$遺業能力番号.$A$1:$遺業能力番号.$B$9];2;0);0)" office:value-type="float" office:value="0" calcext:value-type="float">
            <text:p>0</text:p>
          </table:table-cell>
          <table:table-cell office:value-type="string" calcext:value-type="string">
            <text:p>https://one-draw.jp/ijinden/cardlist/001/card/01_048.png</text:p>
          </table:table-cell>
          <table:table-cell table:formula="of:=CONCATENATE([$JSON.$A$1];[.$C88];[$JSON.$B$1];[.$E88];[$JSON.$C$1];[.$F88];[$JSON.$D$1];IF(ISNA([.$S88]);&quot;null&quot;;&quot;&quot;&quot;&quot;&amp;[.$S88]&amp;&quot;&quot;&quot;&quot;);[$JSON.$E$1];[.$U88];[$JSON.$F$1];IF(ISNA([.$V88]);&quot;null&quot;;&quot;&quot;&quot;&quot;&amp;[.$V88]&amp;&quot;&quot;&quot;&quot;);[$JSON.$G$1];[.$X88];[$JSON.$H$1];[.$H88];[$JSON.$I$1];[.J88];[$JSON.$J$1];[.$L88];[$JSON.$K$1];[.$O88];[$JSON.$L$1];[.$N88];[$JSON.$M$1];[.$R88];[$JSON.$N$1];[.$T88];[$JSON.$O$1];[.$W88];[$JSON.$P$1];[.$A88];[$JSON.$Q$1];[.$B88];[$JSON.$R$1])" office:value-type="string" office:string-value="{&quot;id&quot;:&quot;1-48&quot;,&quot;name&quot;:&quot;円形闘技場&quot;,&quot;kana&quot;:&quot;えんけいとうぎじょう&quot;,&quot;traitText&quot;:null,&quot;ruleText&quot;:&quot;自分のターンの間、自分の戦場のガーディアンは「即応」を持つパワー3000のイジンでもある。&quot;,&quot;legacyText&quot;:null,&quot;imageUrl&quot;:&quot;https://one-draw.jp/ijinden/cardlist/001/card/01_048.png&quot;,&quot;expansion&quot;:15,&quot;rarity&quot;:1,&quot;type&quot;:2,&quot;level&quot;:5,&quot;color&quot;:2,&quot;term&quot;:0,&quot;trait&quot;:0,&quot;legacy&quot;:0,&quot;orderTable&quot;:87,&quot;orderDeck&quot;:267}," calcext:value-type="string">
            <text:p>{"id":"1-48","name":"円形闘技場","kana":"えんけいとうぎじょう","traitText":null,"ruleText":"自分のターンの間、自分の戦場のガーディアンは「即応」を持つパワー3000のイジンでもある。","legacyText":null,"imageUrl":"https://one-draw.jp/ijinden/cardlist/001/card/01_048.png","expansion":15,"rarity":1,"type":2,"level":5,"color":2,"term":0,"trait":0,"legacy":0,"orderTable":87,"orderDeck":267},</text:p>
          </table:table-cell>
          <table:table-cell table:number-columns-repeated="16347"/>
        </table:table-row>
        <table:table-row table:style-name="ro2">
          <table:table-cell office:value-type="float" office:value="88" calcext:value-type="float">
            <text:p>88</text:p>
          </table:table-cell>
          <table:table-cell office:value-type="float" office:value="243" calcext:value-type="float">
            <text:p>243</text:p>
          </table:table-cell>
          <table:table-cell office:value-type="string" calcext:value-type="string">
            <text:p>1-49</text:p>
          </table:table-cell>
          <table:table-cell office:value-type="float" office:value="49" calcext:value-type="float">
            <text:p>49</text:p>
          </table:table-cell>
          <table:table-cell office:value-type="string" calcext:value-type="string">
            <text:p>巨大古墳</text:p>
          </table:table-cell>
          <table:table-cell office:value-type="string" calcext:value-type="string">
            <text:p>きょだいこふん</text:p>
          </table:table-cell>
          <table:table-cell office:value-type="string" calcext:value-type="string">
            <text:p>第１弾ブースターパック</text:p>
          </table:table-cell>
          <table:table-cell table:formula="of:=VLOOKUP([.G89];[$収録番号.$A$1:$収録番号.$B$9];2;0)" office:value-type="float" office:value="15" calcext:value-type="float">
            <text:p>15</text:p>
          </table:table-cell>
          <table:table-cell office:value-type="string" calcext:value-type="string">
            <text:p>N</text:p>
          </table:table-cell>
          <table:table-cell table:formula="of:=VLOOKUP([.I89];[$レアリティ番号.$A$1:$レアリティ番号.$B$4];2;0)" office:value-type="float" office:value="1" calcext:value-type="float">
            <text:p>1</text:p>
          </table:table-cell>
          <table:table-cell office:value-type="string" calcext:value-type="string">
            <text:p>ハイケイ</text:p>
          </table:table-cell>
          <table:table-cell table:formula="of:=VLOOKUP([.K89];[$種類番号.$A$1:$種類番号.$B$4];2;0)" office:value-type="float" office:value="2" calcext:value-type="float">
            <text:p>2</text:p>
          </table:table-cell>
          <table:table-cell office:value-type="string" calcext:value-type="string">
            <text:p>緑</text:p>
          </table:table-cell>
          <table:table-cell table:formula="of:=VLOOKUP([.M89];[$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8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89];[$特性番号.$A$1:$特性番号.$B$8];2;0);0)" office:value-type="float" office:value="0" calcext:value-type="float">
            <text:p>0</text:p>
          </table:table-cell>
          <table:table-cell office:value-type="string" calcext:value-type="string">
            <text:p>自分のスタートフェイズが終了したとき、マリョク配置権+1する。</text:p>
          </table:table-cell>
          <table:table-cell table:style-name="ce8" office:value-type="string" calcext:value-type="string">
            <text:p>魔力化</text:p>
          </table:table-cell>
          <table:table-cell table:formula="of:=IFERROR(VLOOKUP([.$V89];[$遺業能力番号.$A$1:$遺業能力番号.$B$9];2;0);0)" office:value-type="float" office:value="1" calcext:value-type="float">
            <text:p>1</text:p>
          </table:table-cell>
          <table:table-cell office:value-type="string" calcext:value-type="string">
            <text:p>https://one-draw.jp/ijinden/cardlist/001/card/01_049.png</text:p>
          </table:table-cell>
          <table:table-cell table:formula="of:=CONCATENATE([$JSON.$A$1];[.$C89];[$JSON.$B$1];[.$E89];[$JSON.$C$1];[.$F89];[$JSON.$D$1];IF(ISNA([.$S89]);&quot;null&quot;;&quot;&quot;&quot;&quot;&amp;[.$S89]&amp;&quot;&quot;&quot;&quot;);[$JSON.$E$1];[.$U89];[$JSON.$F$1];IF(ISNA([.$V89]);&quot;null&quot;;&quot;&quot;&quot;&quot;&amp;[.$V89]&amp;&quot;&quot;&quot;&quot;);[$JSON.$G$1];[.$X89];[$JSON.$H$1];[.$H89];[$JSON.$I$1];[.J89];[$JSON.$J$1];[.$L89];[$JSON.$K$1];[.$O89];[$JSON.$L$1];[.$N89];[$JSON.$M$1];[.$R89];[$JSON.$N$1];[.$T89];[$JSON.$O$1];[.$W89];[$JSON.$P$1];[.$A89];[$JSON.$Q$1];[.$B89];[$JSON.$R$1])" office:value-type="string" office:string-value="{&quot;id&quot;:&quot;1-49&quot;,&quot;name&quot;:&quot;巨大古墳&quot;,&quot;kana&quot;:&quot;きょだいこふん&quot;,&quot;traitText&quot;:null,&quot;ruleText&quot;:&quot;自分のスタートフェイズが終了したとき、マリョク配置権+1する。&quot;,&quot;legacyText&quot;:&quot;魔力化&quot;,&quot;imageUrl&quot;:&quot;https://one-draw.jp/ijinden/cardlist/001/card/01_049.png&quot;,&quot;expansion&quot;:15,&quot;rarity&quot;:1,&quot;type&quot;:2,&quot;level&quot;:2,&quot;color&quot;:4,&quot;term&quot;:0,&quot;trait&quot;:0,&quot;legacy&quot;:1,&quot;orderTable&quot;:88,&quot;orderDeck&quot;:243}," calcext:value-type="string">
            <text:p>{"id":"1-49","name":"巨大古墳","kana":"きょだいこふん","traitText":null,"ruleText":"自分のスタートフェイズが終了したとき、マリョク配置権+1する。","legacyText":"魔力化","imageUrl":"https://one-draw.jp/ijinden/cardlist/001/card/01_049.png","expansion":15,"rarity":1,"type":2,"level":2,"color":4,"term":0,"trait":0,"legacy":1,"orderTable":88,"orderDeck":243},</text:p>
          </table:table-cell>
          <table:table-cell table:number-columns-repeated="16347"/>
        </table:table-row>
        <table:table-row table:style-name="ro2">
          <table:table-cell office:value-type="float" office:value="89" calcext:value-type="float">
            <text:p>89</text:p>
          </table:table-cell>
          <table:table-cell office:value-type="float" office:value="252" calcext:value-type="float">
            <text:p>252</text:p>
          </table:table-cell>
          <table:table-cell office:value-type="string" calcext:value-type="string">
            <text:p>1-50</text:p>
          </table:table-cell>
          <table:table-cell office:value-type="float" office:value="50" calcext:value-type="float">
            <text:p>50</text:p>
          </table:table-cell>
          <table:table-cell office:value-type="string" calcext:value-type="string">
            <text:p>魔除けの社</text:p>
          </table:table-cell>
          <table:table-cell office:value-type="string" calcext:value-type="string">
            <text:p>まよけのやしろ</text:p>
          </table:table-cell>
          <table:table-cell office:value-type="string" calcext:value-type="string">
            <text:p>第１弾ブースターパック</text:p>
          </table:table-cell>
          <table:table-cell table:formula="of:=VLOOKUP([.G90];[$収録番号.$A$1:$収録番号.$B$9];2;0)" office:value-type="float" office:value="15" calcext:value-type="float">
            <text:p>15</text:p>
          </table:table-cell>
          <table:table-cell office:value-type="string" calcext:value-type="string">
            <text:p>N</text:p>
          </table:table-cell>
          <table:table-cell table:formula="of:=VLOOKUP([.I90];[$レアリティ番号.$A$1:$レアリティ番号.$B$4];2;0)" office:value-type="float" office:value="1" calcext:value-type="float">
            <text:p>1</text:p>
          </table:table-cell>
          <table:table-cell office:value-type="string" calcext:value-type="string">
            <text:p>ハイケイ</text:p>
          </table:table-cell>
          <table:table-cell table:formula="of:=VLOOKUP([.K90];[$種類番号.$A$1:$種類番号.$B$4];2;0)" office:value-type="float" office:value="2" calcext:value-type="float">
            <text:p>2</text:p>
          </table:table-cell>
          <table:table-cell office:value-type="string" calcext:value-type="string">
            <text:p>緑</text:p>
          </table:table-cell>
          <table:table-cell table:formula="of:=VLOOKUP([.M90];[$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9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90];[$特性番号.$A$1:$特性番号.$B$8];2;0);0)" office:value-type="float" office:value="0" calcext:value-type="float">
            <text:p>0</text:p>
          </table:table-cell>
          <table:table-cell office:value-type="string" calcext:value-type="string">
            <text:p>バトル解決に際し、自分の戦場のガーディアンがブロッカーに含まれているなら、パワー4000以下のアタッカーは破壊される。</text:p>
          </table:table-cell>
          <table:table-cell table:style-name="ce8" office:value-type="string" calcext:value-type="string">
            <text:p>魔力化</text:p>
          </table:table-cell>
          <table:table-cell table:formula="of:=IFERROR(VLOOKUP([.$V90];[$遺業能力番号.$A$1:$遺業能力番号.$B$9];2;0);0)" office:value-type="float" office:value="1" calcext:value-type="float">
            <text:p>1</text:p>
          </table:table-cell>
          <table:table-cell office:value-type="string" calcext:value-type="string">
            <text:p>https://one-draw.jp/ijinden/cardlist/001/card/01_050.png</text:p>
          </table:table-cell>
          <table:table-cell table:formula="of:=CONCATENATE([$JSON.$A$1];[.$C90];[$JSON.$B$1];[.$E90];[$JSON.$C$1];[.$F90];[$JSON.$D$1];IF(ISNA([.$S90]);&quot;null&quot;;&quot;&quot;&quot;&quot;&amp;[.$S90]&amp;&quot;&quot;&quot;&quot;);[$JSON.$E$1];[.$U90];[$JSON.$F$1];IF(ISNA([.$V90]);&quot;null&quot;;&quot;&quot;&quot;&quot;&amp;[.$V90]&amp;&quot;&quot;&quot;&quot;);[$JSON.$G$1];[.$X90];[$JSON.$H$1];[.$H90];[$JSON.$I$1];[.J90];[$JSON.$J$1];[.$L90];[$JSON.$K$1];[.$O90];[$JSON.$L$1];[.$N90];[$JSON.$M$1];[.$R90];[$JSON.$N$1];[.$T90];[$JSON.$O$1];[.$W90];[$JSON.$P$1];[.$A90];[$JSON.$Q$1];[.$B90];[$JSON.$R$1])" office:value-type="string" office:string-value="{&quot;id&quot;:&quot;1-50&quot;,&quot;name&quot;:&quot;魔除けの社&quot;,&quot;kana&quot;:&quot;まよけのやしろ&quot;,&quot;traitText&quot;:null,&quot;ruleText&quot;:&quot;バトル解決に際し、自分の戦場のガーディアンがブロッカーに含まれているなら、パワー4000以下のアタッカーは破壊される。&quot;,&quot;legacyText&quot;:&quot;魔力化&quot;,&quot;imageUrl&quot;:&quot;https://one-draw.jp/ijinden/cardlist/001/card/01_050.png&quot;,&quot;expansion&quot;:15,&quot;rarity&quot;:1,&quot;type&quot;:2,&quot;level&quot;:3,&quot;color&quot;:4,&quot;term&quot;:0,&quot;trait&quot;:0,&quot;legacy&quot;:1,&quot;orderTable&quot;:89,&quot;orderDeck&quot;:252}," calcext:value-type="string">
            <text:p>{"id":"1-50","name":"魔除けの社","kana":"まよけのやしろ","traitText":null,"ruleText":"バトル解決に際し、自分の戦場のガーディアンがブロッカーに含まれているなら、パワー4000以下のアタッカーは破壊される。","legacyText":"魔力化","imageUrl":"https://one-draw.jp/ijinden/cardlist/001/card/01_050.png","expansion":15,"rarity":1,"type":2,"level":3,"color":4,"term":0,"trait":0,"legacy":1,"orderTable":89,"orderDeck":252},</text:p>
          </table:table-cell>
          <table:table-cell table:number-columns-repeated="16347"/>
        </table:table-row>
        <table:table-row table:style-name="ro2">
          <table:table-cell office:value-type="float" office:value="90" calcext:value-type="float">
            <text:p>90</text:p>
          </table:table-cell>
          <table:table-cell office:value-type="float" office:value="269" calcext:value-type="float">
            <text:p>269</text:p>
          </table:table-cell>
          <table:table-cell office:value-type="string" calcext:value-type="string">
            <text:p>1-51</text:p>
          </table:table-cell>
          <table:table-cell office:value-type="float" office:value="51" calcext:value-type="float">
            <text:p>51</text:p>
          </table:table-cell>
          <table:table-cell office:value-type="string" calcext:value-type="string">
            <text:p>冨嶽三十六景</text:p>
          </table:table-cell>
          <table:table-cell office:value-type="string" calcext:value-type="string">
            <text:p>ふがくさんじゅうろっけい</text:p>
          </table:table-cell>
          <table:table-cell office:value-type="string" calcext:value-type="string">
            <text:p>第１弾ブースターパック</text:p>
          </table:table-cell>
          <table:table-cell table:formula="of:=VLOOKUP([.G91];[$収録番号.$A$1:$収録番号.$B$9];2;0)" office:value-type="float" office:value="15" calcext:value-type="float">
            <text:p>15</text:p>
          </table:table-cell>
          <table:table-cell office:value-type="string" calcext:value-type="string">
            <text:p>N</text:p>
          </table:table-cell>
          <table:table-cell table:formula="of:=VLOOKUP([.I91];[$レアリティ番号.$A$1:$レアリティ番号.$B$4];2;0)" office:value-type="float" office:value="1" calcext:value-type="float">
            <text:p>1</text:p>
          </table:table-cell>
          <table:table-cell office:value-type="string" calcext:value-type="string">
            <text:p>ハイケイ</text:p>
          </table:table-cell>
          <table:table-cell table:formula="of:=VLOOKUP([.K91];[$種類番号.$A$1:$種類番号.$B$4];2;0)" office:value-type="float" office:value="2" calcext:value-type="float">
            <text:p>2</text:p>
          </table:table-cell>
          <table:table-cell office:value-type="string" calcext:value-type="string">
            <text:p>緑</text:p>
          </table:table-cell>
          <table:table-cell table:formula="of:=VLOOKUP([.M91];[$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91];[$能力語番号.$A$1:$能力語番号.$B$10];2;0);0)" office:value-type="float" office:value="0" calcext:value-type="float">
            <text:p>0</text:p>
          </table:table-cell>
          <table:table-cell office:value-type="string" calcext:value-type="string">
            <text:p>美術</text:p>
          </table:table-cell>
          <table:table-cell table:formula="of:=IFERROR(VLOOKUP([.$S91];[$特性番号.$A$1:$特性番号.$B$8];2;0);0)" office:value-type="float" office:value="2" calcext:value-type="float">
            <text:p>2</text:p>
          </table:table-cell>
          <table:table-cell office:value-type="string" calcext:value-type="string">
            <text:p>自分のメインフェイズが開始したとき、遺業能力を持つ墓地のハイケイ1つを指定して発動できる。そのハイケイを戦場に置く。</text:p>
          </table:table-cell>
          <table:table-cell table:style-name="ce8" table:formula="of:=NA()" office:value-type="string" office:string-value="" calcext:value-type="error">
            <text:p>#N/A</text:p>
          </table:table-cell>
          <table:table-cell table:formula="of:=IFERROR(VLOOKUP([.$V91];[$遺業能力番号.$A$1:$遺業能力番号.$B$9];2;0);0)" office:value-type="float" office:value="0" calcext:value-type="float">
            <text:p>0</text:p>
          </table:table-cell>
          <table:table-cell office:value-type="string" calcext:value-type="string">
            <text:p>https://one-draw.jp/ijinden/cardlist/001/card/01_051.png</text:p>
          </table:table-cell>
          <table:table-cell table:formula="of:=CONCATENATE([$JSON.$A$1];[.$C91];[$JSON.$B$1];[.$E91];[$JSON.$C$1];[.$F91];[$JSON.$D$1];IF(ISNA([.$S91]);&quot;null&quot;;&quot;&quot;&quot;&quot;&amp;[.$S91]&amp;&quot;&quot;&quot;&quot;);[$JSON.$E$1];[.$U91];[$JSON.$F$1];IF(ISNA([.$V91]);&quot;null&quot;;&quot;&quot;&quot;&quot;&amp;[.$V91]&amp;&quot;&quot;&quot;&quot;);[$JSON.$G$1];[.$X91];[$JSON.$H$1];[.$H91];[$JSON.$I$1];[.J91];[$JSON.$J$1];[.$L91];[$JSON.$K$1];[.$O91];[$JSON.$L$1];[.$N91];[$JSON.$M$1];[.$R91];[$JSON.$N$1];[.$T91];[$JSON.$O$1];[.$W91];[$JSON.$P$1];[.$A91];[$JSON.$Q$1];[.$B91];[$JSON.$R$1])" office:value-type="string" office:string-value="{&quot;id&quot;:&quot;1-51&quot;,&quot;name&quot;:&quot;冨嶽三十六景&quot;,&quot;kana&quot;:&quot;ふがくさんじゅうろっけい&quot;,&quot;traitText&quot;:&quot;美術&quot;,&quot;ruleText&quot;:&quot;自分のメインフェイズが開始したとき、遺業能力を持つ墓地のハイケイ1つを指定して発動できる。そのハイケイを戦場に置く。&quot;,&quot;legacyText&quot;:null,&quot;imageUrl&quot;:&quot;https://one-draw.jp/ijinden/cardlist/001/card/01_051.png&quot;,&quot;expansion&quot;:15,&quot;rarity&quot;:1,&quot;type&quot;:2,&quot;level&quot;:5,&quot;color&quot;:4,&quot;term&quot;:0,&quot;trait&quot;:2,&quot;legacy&quot;:0,&quot;orderTable&quot;:90,&quot;orderDeck&quot;:269}," calcext:value-type="string">
            <text:p>{"id":"1-51","name":"冨嶽三十六景","kana":"ふがくさんじゅうろっけい","traitText":"美術","ruleText":"自分のメインフェイズが開始したとき、遺業能力を持つ墓地のハイケイ1つを指定して発動できる。そのハイケイを戦場に置く。","legacyText":null,"imageUrl":"https://one-draw.jp/ijinden/cardlist/001/card/01_051.png","expansion":15,"rarity":1,"type":2,"level":5,"color":4,"term":0,"trait":2,"legacy":0,"orderTable":90,"orderDeck":269},</text:p>
          </table:table-cell>
          <table:table-cell table:number-columns-repeated="16347"/>
        </table:table-row>
        <table:table-row table:style-name="ro2">
          <table:table-cell office:value-type="float" office:value="91" calcext:value-type="float">
            <text:p>91</text:p>
          </table:table-cell>
          <table:table-cell office:value-type="float" office:value="303" calcext:value-type="float">
            <text:p>303</text:p>
          </table:table-cell>
          <table:table-cell office:value-type="string" calcext:value-type="string">
            <text:p>1-52</text:p>
          </table:table-cell>
          <table:table-cell office:value-type="float" office:value="52" calcext:value-type="float">
            <text:p>52</text:p>
          </table:table-cell>
          <table:table-cell office:value-type="string" calcext:value-type="string">
            <text:p>バレット</text:p>
          </table:table-cell>
          <table:table-cell office:value-type="string" calcext:value-type="string">
            <text:p>ばれっと</text:p>
          </table:table-cell>
          <table:table-cell office:value-type="string" calcext:value-type="string">
            <text:p>第１弾ブースターパック</text:p>
          </table:table-cell>
          <table:table-cell table:formula="of:=VLOOKUP([.G92];[$収録番号.$A$1:$収録番号.$B$9];2;0)" office:value-type="float" office:value="15" calcext:value-type="float">
            <text:p>15</text:p>
          </table:table-cell>
          <table:table-cell office:value-type="string" calcext:value-type="string">
            <text:p>N</text:p>
          </table:table-cell>
          <table:table-cell table:formula="of:=VLOOKUP([.I92];[$レアリティ番号.$A$1:$レアリティ番号.$B$4];2;0)" office:value-type="float" office:value="1" calcext:value-type="float">
            <text:p>1</text:p>
          </table:table-cell>
          <table:table-cell office:value-type="string" calcext:value-type="string">
            <text:p>マホウ</text:p>
          </table:table-cell>
          <table:table-cell table:formula="of:=VLOOKUP([.K92];[$種類番号.$A$1:$種類番号.$B$4];2;0)" office:value-type="float" office:value="3" calcext:value-type="float">
            <text:p>3</text:p>
          </table:table-cell>
          <table:table-cell office:value-type="string" calcext:value-type="string">
            <text:p>赤</text:p>
          </table:table-cell>
          <table:table-cell table:formula="of:=VLOOKUP([.M92];[$色番号.$A$1:$色番号.$B$10];2;0)"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Q9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92];[$特性番号.$A$1:$特性番号.$B$8];2;0);0)" office:value-type="float" office:value="0" calcext:value-type="float">
            <text:p>0</text:p>
          </table:table-cell>
          <table:table-cell office:value-type="string" calcext:value-type="string">
            <text:p>自分の戦場のイジン1体と相手の戦場のイジン1体を指定して発動できる。それらのイジンすべてを破壊する。</text:p>
          </table:table-cell>
          <table:table-cell table:style-name="ce8" office:value-type="string" calcext:value-type="string">
            <text:p>冥府発動</text:p>
          </table:table-cell>
          <table:table-cell table:formula="of:=IFERROR(VLOOKUP([.$V92];[$遺業能力番号.$A$1:$遺業能力番号.$B$9];2;0);0)" office:value-type="float" office:value="2" calcext:value-type="float">
            <text:p>2</text:p>
          </table:table-cell>
          <table:table-cell office:value-type="string" calcext:value-type="string">
            <text:p>https://one-draw.jp/ijinden/cardlist/001/card/01_052.png</text:p>
          </table:table-cell>
          <table:table-cell table:formula="of:=CONCATENATE([$JSON.$A$1];[.$C92];[$JSON.$B$1];[.$E92];[$JSON.$C$1];[.$F92];[$JSON.$D$1];IF(ISNA([.$S92]);&quot;null&quot;;&quot;&quot;&quot;&quot;&amp;[.$S92]&amp;&quot;&quot;&quot;&quot;);[$JSON.$E$1];[.$U92];[$JSON.$F$1];IF(ISNA([.$V92]);&quot;null&quot;;&quot;&quot;&quot;&quot;&amp;[.$V92]&amp;&quot;&quot;&quot;&quot;);[$JSON.$G$1];[.$X92];[$JSON.$H$1];[.$H92];[$JSON.$I$1];[.J92];[$JSON.$J$1];[.$L92];[$JSON.$K$1];[.$O92];[$JSON.$L$1];[.$N92];[$JSON.$M$1];[.$R92];[$JSON.$N$1];[.$T92];[$JSON.$O$1];[.$W92];[$JSON.$P$1];[.$A92];[$JSON.$Q$1];[.$B92];[$JSON.$R$1])" office:value-type="string" office:string-value="{&quot;id&quot;:&quot;1-52&quot;,&quot;name&quot;:&quot;バレット&quot;,&quot;kana&quot;:&quot;ばれっと&quot;,&quot;traitText&quot;:null,&quot;ruleText&quot;:&quot;自分の戦場のイジン1体と相手の戦場のイジン1体を指定して発動できる。それらのイジンすべてを破壊する。&quot;,&quot;legacyText&quot;:&quot;冥府発動&quot;,&quot;imageUrl&quot;:&quot;https://one-draw.jp/ijinden/cardlist/001/card/01_052.png&quot;,&quot;expansion&quot;:15,&quot;rarity&quot;:1,&quot;type&quot;:3,&quot;level&quot;:3,&quot;color&quot;:1,&quot;term&quot;:0,&quot;trait&quot;:0,&quot;legacy&quot;:2,&quot;orderTable&quot;:91,&quot;orderDeck&quot;:303}," calcext:value-type="string">
            <text:p>{"id":"1-52","name":"バレット","kana":"ばれっと","traitText":null,"ruleText":"自分の戦場のイジン1体と相手の戦場のイジン1体を指定して発動できる。それらのイジンすべてを破壊する。","legacyText":"冥府発動","imageUrl":"https://one-draw.jp/ijinden/cardlist/001/card/01_052.png","expansion":15,"rarity":1,"type":3,"level":3,"color":1,"term":0,"trait":0,"legacy":2,"orderTable":91,"orderDeck":303},</text:p>
          </table:table-cell>
          <table:table-cell table:number-columns-repeated="16347"/>
        </table:table-row>
        <table:table-row table:style-name="ro2">
          <table:table-cell office:value-type="float" office:value="92" calcext:value-type="float">
            <text:p>92</text:p>
          </table:table-cell>
          <table:table-cell office:value-type="float" office:value="318" calcext:value-type="float">
            <text:p>318</text:p>
          </table:table-cell>
          <table:table-cell office:value-type="string" calcext:value-type="string">
            <text:p>1-53</text:p>
          </table:table-cell>
          <table:table-cell office:value-type="float" office:value="53" calcext:value-type="float">
            <text:p>53</text:p>
          </table:table-cell>
          <table:table-cell office:value-type="string" calcext:value-type="string">
            <text:p>チャンピオン</text:p>
          </table:table-cell>
          <table:table-cell office:value-type="string" calcext:value-type="string">
            <text:p>ちゃんぴおん</text:p>
          </table:table-cell>
          <table:table-cell office:value-type="string" calcext:value-type="string">
            <text:p>第１弾ブースターパック</text:p>
          </table:table-cell>
          <table:table-cell table:formula="of:=VLOOKUP([.G93];[$収録番号.$A$1:$収録番号.$B$9];2;0)" office:value-type="float" office:value="15" calcext:value-type="float">
            <text:p>15</text:p>
          </table:table-cell>
          <table:table-cell office:value-type="string" calcext:value-type="string">
            <text:p>R</text:p>
          </table:table-cell>
          <table:table-cell table:formula="of:=VLOOKUP([.I93];[$レアリティ番号.$A$1:$レアリティ番号.$B$4];2;0)" office:value-type="float" office:value="2" calcext:value-type="float">
            <text:p>2</text:p>
          </table:table-cell>
          <table:table-cell office:value-type="string" calcext:value-type="string">
            <text:p>マホウ</text:p>
          </table:table-cell>
          <table:table-cell table:formula="of:=VLOOKUP([.K93];[$種類番号.$A$1:$種類番号.$B$4];2;0)" office:value-type="float" office:value="3" calcext:value-type="float">
            <text:p>3</text:p>
          </table:table-cell>
          <table:table-cell office:value-type="string" calcext:value-type="string">
            <text:p>赤</text:p>
          </table:table-cell>
          <table:table-cell table:formula="of:=VLOOKUP([.M93];[$色番号.$A$1:$色番号.$B$10];2;0)"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IFERROR(VLOOKUP([.$Q9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93];[$特性番号.$A$1:$特性番号.$B$8];2;0);0)" office:value-type="float" office:value="0" calcext:value-type="float">
            <text:p>0</text:p>
          </table:table-cell>
          <table:table-cell office:value-type="string" calcext:value-type="string">
            <text:p>自分の戦場のイジン1体を指定して発動できる。そのイジンは、このターンの間「イジンにブロックされない」を得る。</text:p>
          </table:table-cell>
          <table:table-cell table:style-name="ce8" table:formula="of:=NA()" office:value-type="string" office:string-value="" calcext:value-type="error">
            <text:p>#N/A</text:p>
          </table:table-cell>
          <table:table-cell table:formula="of:=IFERROR(VLOOKUP([.$V93];[$遺業能力番号.$A$1:$遺業能力番号.$B$9];2;0);0)" office:value-type="float" office:value="0" calcext:value-type="float">
            <text:p>0</text:p>
          </table:table-cell>
          <table:table-cell office:value-type="string" calcext:value-type="string">
            <text:p>https://one-draw.jp/ijinden/cardlist/001/card/01_053.png</text:p>
          </table:table-cell>
          <table:table-cell table:formula="of:=CONCATENATE([$JSON.$A$1];[.$C93];[$JSON.$B$1];[.$E93];[$JSON.$C$1];[.$F93];[$JSON.$D$1];IF(ISNA([.$S93]);&quot;null&quot;;&quot;&quot;&quot;&quot;&amp;[.$S93]&amp;&quot;&quot;&quot;&quot;);[$JSON.$E$1];[.$U93];[$JSON.$F$1];IF(ISNA([.$V93]);&quot;null&quot;;&quot;&quot;&quot;&quot;&amp;[.$V93]&amp;&quot;&quot;&quot;&quot;);[$JSON.$G$1];[.$X93];[$JSON.$H$1];[.$H93];[$JSON.$I$1];[.J93];[$JSON.$J$1];[.$L93];[$JSON.$K$1];[.$O93];[$JSON.$L$1];[.$N93];[$JSON.$M$1];[.$R93];[$JSON.$N$1];[.$T93];[$JSON.$O$1];[.$W93];[$JSON.$P$1];[.$A93];[$JSON.$Q$1];[.$B93];[$JSON.$R$1])" office:value-type="string" office:string-value="{&quot;id&quot;:&quot;1-53&quot;,&quot;name&quot;:&quot;チャンピオン&quot;,&quot;kana&quot;:&quot;ちゃんぴおん&quot;,&quot;traitText&quot;:null,&quot;ruleText&quot;:&quot;自分の戦場のイジン1体を指定して発動できる。そのイジンは、このターンの間「イジンにブロックされない」を得る。&quot;,&quot;legacyText&quot;:null,&quot;imageUrl&quot;:&quot;https://one-draw.jp/ijinden/cardlist/001/card/01_053.png&quot;,&quot;expansion&quot;:15,&quot;rarity&quot;:2,&quot;type&quot;:3,&quot;level&quot;:4,&quot;color&quot;:1,&quot;term&quot;:0,&quot;trait&quot;:0,&quot;legacy&quot;:0,&quot;orderTable&quot;:92,&quot;orderDeck&quot;:318}," calcext:value-type="string">
            <text:p>{"id":"1-53","name":"チャンピオン","kana":"ちゃんぴおん","traitText":null,"ruleText":"自分の戦場のイジン1体を指定して発動できる。そのイジンは、このターンの間「イジンにブロックされない」を得る。","legacyText":null,"imageUrl":"https://one-draw.jp/ijinden/cardlist/001/card/01_053.png","expansion":15,"rarity":2,"type":3,"level":4,"color":1,"term":0,"trait":0,"legacy":0,"orderTable":92,"orderDeck":318},</text:p>
          </table:table-cell>
          <table:table-cell table:number-columns-repeated="16347"/>
        </table:table-row>
        <table:table-row table:style-name="ro2">
          <table:table-cell office:value-type="float" office:value="93" calcext:value-type="float">
            <text:p>93</text:p>
          </table:table-cell>
          <table:table-cell office:value-type="float" office:value="332" calcext:value-type="float">
            <text:p>332</text:p>
          </table:table-cell>
          <table:table-cell office:value-type="string" calcext:value-type="string">
            <text:p>1-54</text:p>
          </table:table-cell>
          <table:table-cell office:value-type="float" office:value="54" calcext:value-type="float">
            <text:p>54</text:p>
          </table:table-cell>
          <table:table-cell office:value-type="string" calcext:value-type="string">
            <text:p>ファイナルアタック</text:p>
          </table:table-cell>
          <table:table-cell office:value-type="string" calcext:value-type="string">
            <text:p>ふぁいなるあたっく</text:p>
          </table:table-cell>
          <table:table-cell office:value-type="string" calcext:value-type="string">
            <text:p>第１弾ブースターパック</text:p>
          </table:table-cell>
          <table:table-cell table:formula="of:=VLOOKUP([.G94];[$収録番号.$A$1:$収録番号.$B$9];2;0)" office:value-type="float" office:value="15" calcext:value-type="float">
            <text:p>15</text:p>
          </table:table-cell>
          <table:table-cell office:value-type="string" calcext:value-type="string">
            <text:p>N</text:p>
          </table:table-cell>
          <table:table-cell table:formula="of:=VLOOKUP([.I94];[$レアリティ番号.$A$1:$レアリティ番号.$B$4];2;0)" office:value-type="float" office:value="1" calcext:value-type="float">
            <text:p>1</text:p>
          </table:table-cell>
          <table:table-cell office:value-type="string" calcext:value-type="string">
            <text:p>マホウ</text:p>
          </table:table-cell>
          <table:table-cell table:formula="of:=VLOOKUP([.K94];[$種類番号.$A$1:$種類番号.$B$4];2;0)" office:value-type="float" office:value="3" calcext:value-type="float">
            <text:p>3</text:p>
          </table:table-cell>
          <table:table-cell office:value-type="string" calcext:value-type="string">
            <text:p>赤</text:p>
          </table:table-cell>
          <table:table-cell table:formula="of:=VLOOKUP([.M94];[$色番号.$A$1:$色番号.$B$10];2;0)"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formula="of:=NA()" office:value-type="string" office:string-value="" calcext:value-type="error">
            <text:p>#N/A</text:p>
          </table:table-cell>
          <table:table-cell table:formula="of:=IFERROR(VLOOKUP([.$Q9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94];[$特性番号.$A$1:$特性番号.$B$8];2;0);0)" office:value-type="float" office:value="0" calcext:value-type="float">
            <text:p>0</text:p>
          </table:table-cell>
          <table:table-cell office:value-type="string" calcext:value-type="string">
            <text:p>次のエンドフェイズが開始したとき、ゲームに敗北する。¶自分の戦場のイジンすべてを起こして、追加でバトルする。</text:p>
          </table:table-cell>
          <table:table-cell table:style-name="ce8" table:formula="of:=NA()" office:value-type="string" office:string-value="" calcext:value-type="error">
            <text:p>#N/A</text:p>
          </table:table-cell>
          <table:table-cell table:formula="of:=IFERROR(VLOOKUP([.$V94];[$遺業能力番号.$A$1:$遺業能力番号.$B$9];2;0);0)" office:value-type="float" office:value="0" calcext:value-type="float">
            <text:p>0</text:p>
          </table:table-cell>
          <table:table-cell office:value-type="string" calcext:value-type="string">
            <text:p>https://one-draw.jp/ijinden/cardlist/001/card/01_054.png</text:p>
          </table:table-cell>
          <table:table-cell table:formula="of:=CONCATENATE([$JSON.$A$1];[.$C94];[$JSON.$B$1];[.$E94];[$JSON.$C$1];[.$F94];[$JSON.$D$1];IF(ISNA([.$S94]);&quot;null&quot;;&quot;&quot;&quot;&quot;&amp;[.$S94]&amp;&quot;&quot;&quot;&quot;);[$JSON.$E$1];[.$U94];[$JSON.$F$1];IF(ISNA([.$V94]);&quot;null&quot;;&quot;&quot;&quot;&quot;&amp;[.$V94]&amp;&quot;&quot;&quot;&quot;);[$JSON.$G$1];[.$X94];[$JSON.$H$1];[.$H94];[$JSON.$I$1];[.J94];[$JSON.$J$1];[.$L94];[$JSON.$K$1];[.$O94];[$JSON.$L$1];[.$N94];[$JSON.$M$1];[.$R94];[$JSON.$N$1];[.$T94];[$JSON.$O$1];[.$W94];[$JSON.$P$1];[.$A94];[$JSON.$Q$1];[.$B94];[$JSON.$R$1])" office:value-type="string" office:string-value="{&quot;id&quot;:&quot;1-54&quot;,&quot;name&quot;:&quot;ファイナルアタック&quot;,&quot;kana&quot;:&quot;ふぁいなるあたっく&quot;,&quot;traitText&quot;:null,&quot;ruleText&quot;:&quot;次のエンドフェイズが開始したとき、ゲームに敗北する。¶自分の戦場のイジンすべてを起こして、追加でバトルする。&quot;,&quot;legacyText&quot;:null,&quot;imageUrl&quot;:&quot;https://one-draw.jp/ijinden/cardlist/001/card/01_054.png&quot;,&quot;expansion&quot;:15,&quot;rarity&quot;:1,&quot;type&quot;:3,&quot;level&quot;:6,&quot;color&quot;:1,&quot;term&quot;:0,&quot;trait&quot;:0,&quot;legacy&quot;:0,&quot;orderTable&quot;:93,&quot;orderDeck&quot;:332}," calcext:value-type="string">
            <text:p>{"id":"1-54","name":"ファイナルアタック","kana":"ふぁいなるあたっく","traitText":null,"ruleText":"次のエンドフェイズが開始したとき、ゲームに敗北する。¶自分の戦場のイジンすべてを起こして、追加でバトルする。","legacyText":null,"imageUrl":"https://one-draw.jp/ijinden/cardlist/001/card/01_054.png","expansion":15,"rarity":1,"type":3,"level":6,"color":1,"term":0,"trait":0,"legacy":0,"orderTable":93,"orderDeck":332},</text:p>
          </table:table-cell>
          <table:table-cell table:number-columns-repeated="16347"/>
        </table:table-row>
        <table:table-row table:style-name="ro2">
          <table:table-cell office:value-type="float" office:value="94" calcext:value-type="float">
            <text:p>94</text:p>
          </table:table-cell>
          <table:table-cell office:value-type="float" office:value="294" calcext:value-type="float">
            <text:p>294</text:p>
          </table:table-cell>
          <table:table-cell office:value-type="string" calcext:value-type="string">
            <text:p>1-55</text:p>
          </table:table-cell>
          <table:table-cell office:value-type="float" office:value="55" calcext:value-type="float">
            <text:p>55</text:p>
          </table:table-cell>
          <table:table-cell office:value-type="string" calcext:value-type="string">
            <text:p>ストーム</text:p>
          </table:table-cell>
          <table:table-cell office:value-type="string" calcext:value-type="string">
            <text:p>すとーむ</text:p>
          </table:table-cell>
          <table:table-cell office:value-type="string" calcext:value-type="string">
            <text:p>第１弾ブースターパック</text:p>
          </table:table-cell>
          <table:table-cell table:formula="of:=VLOOKUP([.G95];[$収録番号.$A$1:$収録番号.$B$9];2;0)" office:value-type="float" office:value="15" calcext:value-type="float">
            <text:p>15</text:p>
          </table:table-cell>
          <table:table-cell office:value-type="string" calcext:value-type="string">
            <text:p>N</text:p>
          </table:table-cell>
          <table:table-cell table:formula="of:=VLOOKUP([.I95];[$レアリティ番号.$A$1:$レアリティ番号.$B$4];2;0)" office:value-type="float" office:value="1" calcext:value-type="float">
            <text:p>1</text:p>
          </table:table-cell>
          <table:table-cell office:value-type="string" calcext:value-type="string">
            <text:p>マホウ</text:p>
          </table:table-cell>
          <table:table-cell table:formula="of:=VLOOKUP([.K95];[$種類番号.$A$1:$種類番号.$B$4];2;0)" office:value-type="float" office:value="3" calcext:value-type="float">
            <text:p>3</text:p>
          </table:table-cell>
          <table:table-cell office:value-type="string" calcext:value-type="string">
            <text:p>青</text:p>
          </table:table-cell>
          <table:table-cell table:formula="of:=VLOOKUP([.M95];[$色番号.$A$1:$色番号.$B$10];2;0)"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9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95];[$特性番号.$A$1:$特性番号.$B$8];2;0);0)" office:value-type="float" office:value="0" calcext:value-type="float">
            <text:p>0</text:p>
          </table:table-cell>
          <table:table-cell office:value-type="string" calcext:value-type="string">
            <text:p>戦場のイジン1体を指定して発動できる。そのイジンを手札に戻す。</text:p>
          </table:table-cell>
          <table:table-cell table:style-name="ce8" office:value-type="string" calcext:value-type="string">
            <text:p>冥府発動</text:p>
          </table:table-cell>
          <table:table-cell table:formula="of:=IFERROR(VLOOKUP([.$V95];[$遺業能力番号.$A$1:$遺業能力番号.$B$9];2;0);0)" office:value-type="float" office:value="2" calcext:value-type="float">
            <text:p>2</text:p>
          </table:table-cell>
          <table:table-cell office:value-type="string" calcext:value-type="string">
            <text:p>https://one-draw.jp/ijinden/cardlist/001/card/01_055.png</text:p>
          </table:table-cell>
          <table:table-cell table:formula="of:=CONCATENATE([$JSON.$A$1];[.$C95];[$JSON.$B$1];[.$E95];[$JSON.$C$1];[.$F95];[$JSON.$D$1];IF(ISNA([.$S95]);&quot;null&quot;;&quot;&quot;&quot;&quot;&amp;[.$S95]&amp;&quot;&quot;&quot;&quot;);[$JSON.$E$1];[.$U95];[$JSON.$F$1];IF(ISNA([.$V95]);&quot;null&quot;;&quot;&quot;&quot;&quot;&amp;[.$V95]&amp;&quot;&quot;&quot;&quot;);[$JSON.$G$1];[.$X95];[$JSON.$H$1];[.$H95];[$JSON.$I$1];[.J95];[$JSON.$J$1];[.$L95];[$JSON.$K$1];[.$O95];[$JSON.$L$1];[.$N95];[$JSON.$M$1];[.$R95];[$JSON.$N$1];[.$T95];[$JSON.$O$1];[.$W95];[$JSON.$P$1];[.$A95];[$JSON.$Q$1];[.$B95];[$JSON.$R$1])" office:value-type="string" office:string-value="{&quot;id&quot;:&quot;1-55&quot;,&quot;name&quot;:&quot;ストーム&quot;,&quot;kana&quot;:&quot;すとーむ&quot;,&quot;traitText&quot;:null,&quot;ruleText&quot;:&quot;戦場のイジン1体を指定して発動できる。そのイジンを手札に戻す。&quot;,&quot;legacyText&quot;:&quot;冥府発動&quot;,&quot;imageUrl&quot;:&quot;https://one-draw.jp/ijinden/cardlist/001/card/01_055.png&quot;,&quot;expansion&quot;:15,&quot;rarity&quot;:1,&quot;type&quot;:3,&quot;level&quot;:2,&quot;color&quot;:2,&quot;term&quot;:0,&quot;trait&quot;:0,&quot;legacy&quot;:2,&quot;orderTable&quot;:94,&quot;orderDeck&quot;:294}," calcext:value-type="string">
            <text:p>{"id":"1-55","name":"ストーム","kana":"すとーむ","traitText":null,"ruleText":"戦場のイジン1体を指定して発動できる。そのイジンを手札に戻す。","legacyText":"冥府発動","imageUrl":"https://one-draw.jp/ijinden/cardlist/001/card/01_055.png","expansion":15,"rarity":1,"type":3,"level":2,"color":2,"term":0,"trait":0,"legacy":2,"orderTable":94,"orderDeck":294},</text:p>
          </table:table-cell>
          <table:table-cell table:number-columns-repeated="16347"/>
        </table:table-row>
        <table:table-row table:style-name="ro2">
          <table:table-cell office:value-type="float" office:value="95" calcext:value-type="float">
            <text:p>95</text:p>
          </table:table-cell>
          <table:table-cell office:value-type="float" office:value="319" calcext:value-type="float">
            <text:p>319</text:p>
          </table:table-cell>
          <table:table-cell office:value-type="string" calcext:value-type="string">
            <text:p>1-56</text:p>
          </table:table-cell>
          <table:table-cell office:value-type="float" office:value="56" calcext:value-type="float">
            <text:p>56</text:p>
          </table:table-cell>
          <table:table-cell office:value-type="string" calcext:value-type="string">
            <text:p>リバイバル</text:p>
          </table:table-cell>
          <table:table-cell office:value-type="string" calcext:value-type="string">
            <text:p>りばいばる</text:p>
          </table:table-cell>
          <table:table-cell office:value-type="string" calcext:value-type="string">
            <text:p>第１弾ブースターパック</text:p>
          </table:table-cell>
          <table:table-cell table:formula="of:=VLOOKUP([.G96];[$収録番号.$A$1:$収録番号.$B$9];2;0)" office:value-type="float" office:value="15" calcext:value-type="float">
            <text:p>15</text:p>
          </table:table-cell>
          <table:table-cell office:value-type="string" calcext:value-type="string">
            <text:p>R</text:p>
          </table:table-cell>
          <table:table-cell table:formula="of:=VLOOKUP([.I96];[$レアリティ番号.$A$1:$レアリティ番号.$B$4];2;0)" office:value-type="float" office:value="2" calcext:value-type="float">
            <text:p>2</text:p>
          </table:table-cell>
          <table:table-cell office:value-type="string" calcext:value-type="string">
            <text:p>マホウ</text:p>
          </table:table-cell>
          <table:table-cell table:formula="of:=VLOOKUP([.K96];[$種類番号.$A$1:$種類番号.$B$4];2;0)" office:value-type="float" office:value="3" calcext:value-type="float">
            <text:p>3</text:p>
          </table:table-cell>
          <table:table-cell office:value-type="string" calcext:value-type="string">
            <text:p>青</text:p>
          </table:table-cell>
          <table:table-cell table:formula="of:=VLOOKUP([.M96];[$色番号.$A$1:$色番号.$B$10];2;0)"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9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96];[$特性番号.$A$1:$特性番号.$B$8];2;0);0)" office:value-type="float" office:value="0" calcext:value-type="float">
            <text:p>0</text:p>
          </table:table-cell>
          <table:table-cell office:value-type="string" calcext:value-type="string">
            <text:p>自分の墓地のレベル6以下のイジン1体か、自分の墓地のレベル5以下のハイケイ1つを指定して発動できる。そのイジンかハイケイを手札に戻す。自分の戦場に「美術」イジンがいるなら、手札に戻す代わりに戦場に置いてもよい。</text:p>
          </table:table-cell>
          <table:table-cell table:style-name="ce8" office:value-type="string" calcext:value-type="string">
            <text:p>冥府発動</text:p>
          </table:table-cell>
          <table:table-cell table:formula="of:=IFERROR(VLOOKUP([.$V96];[$遺業能力番号.$A$1:$遺業能力番号.$B$9];2;0);0)" office:value-type="float" office:value="2" calcext:value-type="float">
            <text:p>2</text:p>
          </table:table-cell>
          <table:table-cell office:value-type="string" calcext:value-type="string">
            <text:p>https://one-draw.jp/ijinden/cardlist/001/card/01_056.png</text:p>
          </table:table-cell>
          <table:table-cell table:formula="of:=CONCATENATE([$JSON.$A$1];[.$C96];[$JSON.$B$1];[.$E96];[$JSON.$C$1];[.$F96];[$JSON.$D$1];IF(ISNA([.$S96]);&quot;null&quot;;&quot;&quot;&quot;&quot;&amp;[.$S96]&amp;&quot;&quot;&quot;&quot;);[$JSON.$E$1];[.$U96];[$JSON.$F$1];IF(ISNA([.$V96]);&quot;null&quot;;&quot;&quot;&quot;&quot;&amp;[.$V96]&amp;&quot;&quot;&quot;&quot;);[$JSON.$G$1];[.$X96];[$JSON.$H$1];[.$H96];[$JSON.$I$1];[.J96];[$JSON.$J$1];[.$L96];[$JSON.$K$1];[.$O96];[$JSON.$L$1];[.$N96];[$JSON.$M$1];[.$R96];[$JSON.$N$1];[.$T96];[$JSON.$O$1];[.$W96];[$JSON.$P$1];[.$A96];[$JSON.$Q$1];[.$B96];[$JSON.$R$1])" office:value-type="string" office:string-value="{&quot;id&quot;:&quot;1-56&quot;,&quot;name&quot;:&quot;リバイバル&quot;,&quot;kana&quot;:&quot;りばいばる&quot;,&quot;traitText&quot;:null,&quot;ruleText&quot;:&quot;自分の墓地のレベル6以下のイジン1体か、自分の墓地のレベル5以下のハイケイ1つを指定して発動できる。そのイジンかハイケイを手札に戻す。自分の戦場に「美術」イジンがいるなら、手札に戻す代わりに戦場に置いてもよい。&quot;,&quot;legacyText&quot;:&quot;冥府発動&quot;,&quot;imageUrl&quot;:&quot;https://one-draw.jp/ijinden/cardlist/001/card/01_056.png&quot;,&quot;expansion&quot;:15,&quot;rarity&quot;:2,&quot;type&quot;:3,&quot;level&quot;:4,&quot;color&quot;:2,&quot;term&quot;:0,&quot;trait&quot;:0,&quot;legacy&quot;:2,&quot;orderTable&quot;:95,&quot;orderDeck&quot;:319}," calcext:value-type="string">
            <text:p>{"id":"1-56","name":"リバイバル","kana":"りばいばる","traitText":null,"ruleText":"自分の墓地のレベル6以下のイジン1体か、自分の墓地のレベル5以下のハイケイ1つを指定して発動できる。そのイジンかハイケイを手札に戻す。自分の戦場に「美術」イジンがいるなら、手札に戻す代わりに戦場に置いてもよい。","legacyText":"冥府発動","imageUrl":"https://one-draw.jp/ijinden/cardlist/001/card/01_056.png","expansion":15,"rarity":2,"type":3,"level":4,"color":2,"term":0,"trait":0,"legacy":2,"orderTable":95,"orderDeck":319},</text:p>
          </table:table-cell>
          <table:table-cell table:number-columns-repeated="16347"/>
        </table:table-row>
        <table:table-row table:style-name="ro2">
          <table:table-cell office:value-type="float" office:value="96" calcext:value-type="float">
            <text:p>96</text:p>
          </table:table-cell>
          <table:table-cell office:value-type="float" office:value="321" calcext:value-type="float">
            <text:p>321</text:p>
          </table:table-cell>
          <table:table-cell office:value-type="string" calcext:value-type="string">
            <text:p>1-57</text:p>
          </table:table-cell>
          <table:table-cell office:value-type="float" office:value="57" calcext:value-type="float">
            <text:p>57</text:p>
          </table:table-cell>
          <table:table-cell office:value-type="string" calcext:value-type="string">
            <text:p>エイジング</text:p>
          </table:table-cell>
          <table:table-cell office:value-type="string" calcext:value-type="string">
            <text:p>えいじんぐ</text:p>
          </table:table-cell>
          <table:table-cell office:value-type="string" calcext:value-type="string">
            <text:p>第１弾ブースターパック</text:p>
          </table:table-cell>
          <table:table-cell table:formula="of:=VLOOKUP([.G97];[$収録番号.$A$1:$収録番号.$B$9];2;0)" office:value-type="float" office:value="15" calcext:value-type="float">
            <text:p>15</text:p>
          </table:table-cell>
          <table:table-cell office:value-type="string" calcext:value-type="string">
            <text:p>R</text:p>
          </table:table-cell>
          <table:table-cell table:formula="of:=VLOOKUP([.I97];[$レアリティ番号.$A$1:$レアリティ番号.$B$4];2;0)" office:value-type="float" office:value="2" calcext:value-type="float">
            <text:p>2</text:p>
          </table:table-cell>
          <table:table-cell office:value-type="string" calcext:value-type="string">
            <text:p>マホウ</text:p>
          </table:table-cell>
          <table:table-cell table:formula="of:=VLOOKUP([.K97];[$種類番号.$A$1:$種類番号.$B$4];2;0)" office:value-type="float" office:value="3" calcext:value-type="float">
            <text:p>3</text:p>
          </table:table-cell>
          <table:table-cell office:value-type="string" calcext:value-type="string">
            <text:p>緑</text:p>
          </table:table-cell>
          <table:table-cell table:formula="of:=VLOOKUP([.M97];[$色番号.$A$1:$色番号.$B$10];2;0)" office:value-type="float" office:value="4" calcext:value-type="float">
            <text:p>4</text:p>
          </table:table-cell>
          <table:table-cell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IFERROR(VLOOKUP([.$Q9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97];[$特性番号.$A$1:$特性番号.$B$8];2;0);0)" office:value-type="float" office:value="0" calcext:value-type="float">
            <text:p>0</text:p>
          </table:table-cell>
          <table:table-cell office:value-type="string" calcext:value-type="string">
            <text:p>相手の戦場のイジン1体を指定して発動できる。そのイジンを裏にして魔力ゾーンに置く。</text:p>
          </table:table-cell>
          <table:table-cell table:style-name="ce8" office:value-type="string" calcext:value-type="string">
            <text:p>冥府発動</text:p>
          </table:table-cell>
          <table:table-cell table:formula="of:=IFERROR(VLOOKUP([.$V97];[$遺業能力番号.$A$1:$遺業能力番号.$B$9];2;0);0)" office:value-type="float" office:value="2" calcext:value-type="float">
            <text:p>2</text:p>
          </table:table-cell>
          <table:table-cell office:value-type="string" calcext:value-type="string">
            <text:p>https://one-draw.jp/ijinden/cardlist/001/card/01_057.png</text:p>
          </table:table-cell>
          <table:table-cell table:formula="of:=CONCATENATE([$JSON.$A$1];[.$C97];[$JSON.$B$1];[.$E97];[$JSON.$C$1];[.$F97];[$JSON.$D$1];IF(ISNA([.$S97]);&quot;null&quot;;&quot;&quot;&quot;&quot;&amp;[.$S97]&amp;&quot;&quot;&quot;&quot;);[$JSON.$E$1];[.$U97];[$JSON.$F$1];IF(ISNA([.$V97]);&quot;null&quot;;&quot;&quot;&quot;&quot;&amp;[.$V97]&amp;&quot;&quot;&quot;&quot;);[$JSON.$G$1];[.$X97];[$JSON.$H$1];[.$H97];[$JSON.$I$1];[.J97];[$JSON.$J$1];[.$L97];[$JSON.$K$1];[.$O97];[$JSON.$L$1];[.$N97];[$JSON.$M$1];[.$R97];[$JSON.$N$1];[.$T97];[$JSON.$O$1];[.$W97];[$JSON.$P$1];[.$A97];[$JSON.$Q$1];[.$B97];[$JSON.$R$1])" office:value-type="string" office:string-value="{&quot;id&quot;:&quot;1-57&quot;,&quot;name&quot;:&quot;エイジング&quot;,&quot;kana&quot;:&quot;えいじんぐ&quot;,&quot;traitText&quot;:null,&quot;ruleText&quot;:&quot;相手の戦場のイジン1体を指定して発動できる。そのイジンを裏にして魔力ゾーンに置く。&quot;,&quot;legacyText&quot;:&quot;冥府発動&quot;,&quot;imageUrl&quot;:&quot;https://one-draw.jp/ijinden/cardlist/001/card/01_057.png&quot;,&quot;expansion&quot;:15,&quot;rarity&quot;:2,&quot;type&quot;:3,&quot;level&quot;:4,&quot;color&quot;:4,&quot;term&quot;:0,&quot;trait&quot;:0,&quot;legacy&quot;:2,&quot;orderTable&quot;:96,&quot;orderDeck&quot;:321}," calcext:value-type="string">
            <text:p>{"id":"1-57","name":"エイジング","kana":"えいじんぐ","traitText":null,"ruleText":"相手の戦場のイジン1体を指定して発動できる。そのイジンを裏にして魔力ゾーンに置く。","legacyText":"冥府発動","imageUrl":"https://one-draw.jp/ijinden/cardlist/001/card/01_057.png","expansion":15,"rarity":2,"type":3,"level":4,"color":4,"term":0,"trait":0,"legacy":2,"orderTable":96,"orderDeck":321},</text:p>
          </table:table-cell>
          <table:table-cell table:number-columns-repeated="16347"/>
        </table:table-row>
        <table:table-row table:style-name="ro2">
          <table:table-cell office:value-type="float" office:value="97" calcext:value-type="float">
            <text:p>97</text:p>
          </table:table-cell>
          <table:table-cell office:value-type="float" office:value="344" calcext:value-type="float">
            <text:p>344</text:p>
          </table:table-cell>
          <table:table-cell office:value-type="string" calcext:value-type="string">
            <text:p>1-58</text:p>
          </table:table-cell>
          <table:table-cell office:value-type="float" office:value="58" calcext:value-type="float">
            <text:p>58</text:p>
          </table:table-cell>
          <table:table-cell office:value-type="string" calcext:value-type="string">
            <text:p>カンテラ</text:p>
          </table:table-cell>
          <table:table-cell office:value-type="string" calcext:value-type="string">
            <text:p>かんてら</text:p>
          </table:table-cell>
          <table:table-cell office:value-type="string" calcext:value-type="string">
            <text:p>第１弾ブースターパック</text:p>
          </table:table-cell>
          <table:table-cell table:formula="of:=VLOOKUP([.G98];[$収録番号.$A$1:$収録番号.$B$9];2;0)" office:value-type="float" office:value="15" calcext:value-type="float">
            <text:p>15</text:p>
          </table:table-cell>
          <table:table-cell office:value-type="string" calcext:value-type="string">
            <text:p>N</text:p>
          </table:table-cell>
          <table:table-cell table:formula="of:=VLOOKUP([.I98];[$レアリティ番号.$A$1:$レアリティ番号.$B$4];2;0)" office:value-type="float" office:value="1" calcext:value-type="float">
            <text:p>1</text:p>
          </table:table-cell>
          <table:table-cell office:value-type="string" calcext:value-type="string">
            <text:p>マリョク</text:p>
          </table:table-cell>
          <table:table-cell table:formula="of:=VLOOKUP([.K98];[$種類番号.$A$1:$種類番号.$B$4];2;0)" office:value-type="float" office:value="4" calcext:value-type="float">
            <text:p>4</text:p>
          </table:table-cell>
          <table:table-cell office:value-type="string" calcext:value-type="string">
            <text:p>赤</text:p>
          </table:table-cell>
          <table:table-cell table:formula="of:=VLOOKUP([.M98];[$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9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98];[$特性番号.$A$1:$特性番号.$B$8];2;0);0)" office:value-type="float" office:value="0" calcext:value-type="float">
            <text:p>0</text:p>
          </table:table-cell>
          <table:table-cell office:value-type="string" calcext:value-type="string">
            <text:p>魔力ゾーンに置かれたとき、1ドローする。</text:p>
          </table:table-cell>
          <table:table-cell table:style-name="ce8" table:formula="of:=NA()" office:value-type="string" office:string-value="" calcext:value-type="error">
            <text:p>#N/A</text:p>
          </table:table-cell>
          <table:table-cell table:formula="of:=IFERROR(VLOOKUP([.$V98];[$遺業能力番号.$A$1:$遺業能力番号.$B$9];2;0);0)" office:value-type="float" office:value="0" calcext:value-type="float">
            <text:p>0</text:p>
          </table:table-cell>
          <table:table-cell office:value-type="string" calcext:value-type="string">
            <text:p>https://one-draw.jp/ijinden/cardlist/001/card/01_058.png</text:p>
          </table:table-cell>
          <table:table-cell table:formula="of:=CONCATENATE([$JSON.$A$1];[.$C98];[$JSON.$B$1];[.$E98];[$JSON.$C$1];[.$F98];[$JSON.$D$1];IF(ISNA([.$S98]);&quot;null&quot;;&quot;&quot;&quot;&quot;&amp;[.$S98]&amp;&quot;&quot;&quot;&quot;);[$JSON.$E$1];[.$U98];[$JSON.$F$1];IF(ISNA([.$V98]);&quot;null&quot;;&quot;&quot;&quot;&quot;&amp;[.$V98]&amp;&quot;&quot;&quot;&quot;);[$JSON.$G$1];[.$X98];[$JSON.$H$1];[.$H98];[$JSON.$I$1];[.J98];[$JSON.$J$1];[.$L98];[$JSON.$K$1];[.$O98];[$JSON.$L$1];[.$N98];[$JSON.$M$1];[.$R98];[$JSON.$N$1];[.$T98];[$JSON.$O$1];[.$W98];[$JSON.$P$1];[.$A98];[$JSON.$Q$1];[.$B98];[$JSON.$R$1])" office:value-type="string" office:string-value="{&quot;id&quot;:&quot;1-58&quot;,&quot;name&quot;:&quot;カンテラ&quot;,&quot;kana&quot;:&quot;かんてら&quot;,&quot;traitText&quot;:null,&quot;ruleText&quot;:&quot;魔力ゾーンに置かれたとき、1ドローする。&quot;,&quot;legacyText&quot;:null,&quot;imageUrl&quot;:&quot;https://one-draw.jp/ijinden/cardlist/001/card/01_058.png&quot;,&quot;expansion&quot;:15,&quot;rarity&quot;:1,&quot;type&quot;:4,&quot;level&quot;:1,&quot;color&quot;:1,&quot;term&quot;:0,&quot;trait&quot;:0,&quot;legacy&quot;:0,&quot;orderTable&quot;:97,&quot;orderDeck&quot;:344}," calcext:value-type="string">
            <text:p>{"id":"1-58","name":"カンテラ","kana":"かんてら","traitText":null,"ruleText":"魔力ゾーンに置かれたとき、1ドローする。","legacyText":null,"imageUrl":"https://one-draw.jp/ijinden/cardlist/001/card/01_058.png","expansion":15,"rarity":1,"type":4,"level":1,"color":1,"term":0,"trait":0,"legacy":0,"orderTable":97,"orderDeck":344},</text:p>
          </table:table-cell>
          <table:table-cell table:number-columns-repeated="16347"/>
        </table:table-row>
        <table:table-row table:style-name="ro2">
          <table:table-cell office:value-type="float" office:value="98" calcext:value-type="float">
            <text:p>98</text:p>
          </table:table-cell>
          <table:table-cell office:value-type="float" office:value="345" calcext:value-type="float">
            <text:p>345</text:p>
          </table:table-cell>
          <table:table-cell office:value-type="string" calcext:value-type="string">
            <text:p>1-59</text:p>
          </table:table-cell>
          <table:table-cell office:value-type="float" office:value="59" calcext:value-type="float">
            <text:p>59</text:p>
          </table:table-cell>
          <table:table-cell office:value-type="string" calcext:value-type="string">
            <text:p>ファイアソード</text:p>
          </table:table-cell>
          <table:table-cell office:value-type="string" calcext:value-type="string">
            <text:p>ふぁいあそーど</text:p>
          </table:table-cell>
          <table:table-cell office:value-type="string" calcext:value-type="string">
            <text:p>第１弾ブースターパック</text:p>
          </table:table-cell>
          <table:table-cell table:formula="of:=VLOOKUP([.G99];[$収録番号.$A$1:$収録番号.$B$9];2;0)" office:value-type="float" office:value="15" calcext:value-type="float">
            <text:p>15</text:p>
          </table:table-cell>
          <table:table-cell office:value-type="string" calcext:value-type="string">
            <text:p>N</text:p>
          </table:table-cell>
          <table:table-cell table:formula="of:=VLOOKUP([.I99];[$レアリティ番号.$A$1:$レアリティ番号.$B$4];2;0)" office:value-type="float" office:value="1" calcext:value-type="float">
            <text:p>1</text:p>
          </table:table-cell>
          <table:table-cell office:value-type="string" calcext:value-type="string">
            <text:p>マリョク</text:p>
          </table:table-cell>
          <table:table-cell table:formula="of:=VLOOKUP([.K99];[$種類番号.$A$1:$種類番号.$B$4];2;0)" office:value-type="float" office:value="4" calcext:value-type="float">
            <text:p>4</text:p>
          </table:table-cell>
          <table:table-cell office:value-type="string" calcext:value-type="string">
            <text:p>赤</text:p>
          </table:table-cell>
          <table:table-cell table:formula="of:=VLOOKUP([.M99];[$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9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99];[$特性番号.$A$1:$特性番号.$B$8];2;0);0)" office:value-type="float" office:value="0" calcext:value-type="float">
            <text:p>0</text:p>
          </table:table-cell>
          <table:table-cell office:value-type="string" calcext:value-type="string">
            <text:p>イジン召喚によってイジンが自分の戦場に置かれる際、魔力ゾーンに置かれているこれを、そのイジンに装備させてもよい。¶装備 : アタック+2000</text:p>
          </table:table-cell>
          <table:table-cell table:style-name="ce8" table:formula="of:=NA()" office:value-type="string" office:string-value="" calcext:value-type="error">
            <text:p>#N/A</text:p>
          </table:table-cell>
          <table:table-cell table:formula="of:=IFERROR(VLOOKUP([.$V99];[$遺業能力番号.$A$1:$遺業能力番号.$B$9];2;0);0)" office:value-type="float" office:value="0" calcext:value-type="float">
            <text:p>0</text:p>
          </table:table-cell>
          <table:table-cell office:value-type="string" calcext:value-type="string">
            <text:p>https://one-draw.jp/ijinden/cardlist/001/card/01_059.png</text:p>
          </table:table-cell>
          <table:table-cell table:formula="of:=CONCATENATE([$JSON.$A$1];[.$C99];[$JSON.$B$1];[.$E99];[$JSON.$C$1];[.$F99];[$JSON.$D$1];IF(ISNA([.$S99]);&quot;null&quot;;&quot;&quot;&quot;&quot;&amp;[.$S99]&amp;&quot;&quot;&quot;&quot;);[$JSON.$E$1];[.$U99];[$JSON.$F$1];IF(ISNA([.$V99]);&quot;null&quot;;&quot;&quot;&quot;&quot;&amp;[.$V99]&amp;&quot;&quot;&quot;&quot;);[$JSON.$G$1];[.$X99];[$JSON.$H$1];[.$H99];[$JSON.$I$1];[.J99];[$JSON.$J$1];[.$L99];[$JSON.$K$1];[.$O99];[$JSON.$L$1];[.$N99];[$JSON.$M$1];[.$R99];[$JSON.$N$1];[.$T99];[$JSON.$O$1];[.$W99];[$JSON.$P$1];[.$A99];[$JSON.$Q$1];[.$B99];[$JSON.$R$1])" office:value-type="string" office:string-value="{&quot;id&quot;:&quot;1-59&quot;,&quot;name&quot;:&quot;ファイアソード&quot;,&quot;kana&quot;:&quot;ふぁいあそーど&quot;,&quot;traitText&quot;:null,&quot;ruleText&quot;:&quot;イジン召喚によってイジンが自分の戦場に置かれる際、魔力ゾーンに置かれているこれを、そのイジンに装備させてもよい。¶装備 : アタック+2000&quot;,&quot;legacyText&quot;:null,&quot;imageUrl&quot;:&quot;https://one-draw.jp/ijinden/cardlist/001/card/01_059.png&quot;,&quot;expansion&quot;:15,&quot;rarity&quot;:1,&quot;type&quot;:4,&quot;level&quot;:1,&quot;color&quot;:1,&quot;term&quot;:0,&quot;trait&quot;:0,&quot;legacy&quot;:0,&quot;orderTable&quot;:98,&quot;orderDeck&quot;:345}," calcext:value-type="string">
            <text:p>{"id":"1-59","name":"ファイアソード","kana":"ふぁいあそーど","traitText":null,"ruleText":"イジン召喚によってイジンが自分の戦場に置かれる際、魔力ゾーンに置かれているこれを、そのイジンに装備させてもよい。¶装備 : アタック+2000","legacyText":null,"imageUrl":"https://one-draw.jp/ijinden/cardlist/001/card/01_059.png","expansion":15,"rarity":1,"type":4,"level":1,"color":1,"term":0,"trait":0,"legacy":0,"orderTable":98,"orderDeck":345},</text:p>
          </table:table-cell>
          <table:table-cell table:number-columns-repeated="16347"/>
        </table:table-row>
        <table:table-row table:style-name="ro2">
          <table:table-cell office:value-type="float" office:value="99" calcext:value-type="float">
            <text:p>99</text:p>
          </table:table-cell>
          <table:table-cell office:value-type="float" office:value="346" calcext:value-type="float">
            <text:p>346</text:p>
          </table:table-cell>
          <table:table-cell office:value-type="string" calcext:value-type="string">
            <text:p>1-60</text:p>
          </table:table-cell>
          <table:table-cell office:value-type="float" office:value="60" calcext:value-type="float">
            <text:p>60</text:p>
          </table:table-cell>
          <table:table-cell office:value-type="string" calcext:value-type="string">
            <text:p>髭切</text:p>
          </table:table-cell>
          <table:table-cell office:value-type="string" calcext:value-type="string">
            <text:p>ひげきり</text:p>
          </table:table-cell>
          <table:table-cell office:value-type="string" calcext:value-type="string">
            <text:p>第１弾ブースターパック</text:p>
          </table:table-cell>
          <table:table-cell table:formula="of:=VLOOKUP([.G100];[$収録番号.$A$1:$収録番号.$B$9];2;0)" office:value-type="float" office:value="15" calcext:value-type="float">
            <text:p>15</text:p>
          </table:table-cell>
          <table:table-cell office:value-type="string" calcext:value-type="string">
            <text:p>N</text:p>
          </table:table-cell>
          <table:table-cell table:formula="of:=VLOOKUP([.I100];[$レアリティ番号.$A$1:$レアリティ番号.$B$4];2;0)" office:value-type="float" office:value="1" calcext:value-type="float">
            <text:p>1</text:p>
          </table:table-cell>
          <table:table-cell office:value-type="string" calcext:value-type="string">
            <text:p>マリョク</text:p>
          </table:table-cell>
          <table:table-cell table:formula="of:=VLOOKUP([.K100];[$種類番号.$A$1:$種類番号.$B$4];2;0)" office:value-type="float" office:value="4" calcext:value-type="float">
            <text:p>4</text:p>
          </table:table-cell>
          <table:table-cell office:value-type="string" calcext:value-type="string">
            <text:p>赤</text:p>
          </table:table-cell>
          <table:table-cell table:formula="of:=VLOOKUP([.M100];[$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0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00];[$特性番号.$A$1:$特性番号.$B$8];2;0);0)" office:value-type="float" office:value="0" calcext:value-type="float">
            <text:p>0</text:p>
          </table:table-cell>
          <table:table-cell office:value-type="string" calcext:value-type="string">
            <text:p>イジン召喚によってイジンが自分の戦場に置かれる際、魔力ゾーンに置かれているこれを、そのイジンに装備させてもよい。¶装備 : 「特性：剣術」 アタック+1000</text:p>
          </table:table-cell>
          <table:table-cell table:style-name="ce8" office:value-type="string" calcext:value-type="string">
            <text:p>復元</text:p>
          </table:table-cell>
          <table:table-cell table:formula="of:=IFERROR(VLOOKUP([.$V100];[$遺業能力番号.$A$1:$遺業能力番号.$B$9];2;0);0)" office:value-type="float" office:value="3" calcext:value-type="float">
            <text:p>3</text:p>
          </table:table-cell>
          <table:table-cell office:value-type="string" calcext:value-type="string">
            <text:p>https://one-draw.jp/ijinden/cardlist/001/card/01_060.png</text:p>
          </table:table-cell>
          <table:table-cell table:formula="of:=CONCATENATE([$JSON.$A$1];[.$C100];[$JSON.$B$1];[.$E100];[$JSON.$C$1];[.$F100];[$JSON.$D$1];IF(ISNA([.$S100]);&quot;null&quot;;&quot;&quot;&quot;&quot;&amp;[.$S100]&amp;&quot;&quot;&quot;&quot;);[$JSON.$E$1];[.$U100];[$JSON.$F$1];IF(ISNA([.$V100]);&quot;null&quot;;&quot;&quot;&quot;&quot;&amp;[.$V100]&amp;&quot;&quot;&quot;&quot;);[$JSON.$G$1];[.$X100];[$JSON.$H$1];[.$H100];[$JSON.$I$1];[.J100];[$JSON.$J$1];[.$L100];[$JSON.$K$1];[.$O100];[$JSON.$L$1];[.$N100];[$JSON.$M$1];[.$R100];[$JSON.$N$1];[.$T100];[$JSON.$O$1];[.$W100];[$JSON.$P$1];[.$A100];[$JSON.$Q$1];[.$B100];[$JSON.$R$1])" office:value-type="string" office:string-value="{&quot;id&quot;:&quot;1-60&quot;,&quot;name&quot;:&quot;髭切&quot;,&quot;kana&quot;:&quot;ひげきり&quot;,&quot;traitText&quot;:null,&quot;ruleText&quot;:&quot;イジン召喚によってイジンが自分の戦場に置かれる際、魔力ゾーンに置かれているこれを、そのイジンに装備させてもよい。¶装備 : 「特性：剣術」 アタック+1000&quot;,&quot;legacyText&quot;:&quot;復元&quot;,&quot;imageUrl&quot;:&quot;https://one-draw.jp/ijinden/cardlist/001/card/01_060.png&quot;,&quot;expansion&quot;:15,&quot;rarity&quot;:1,&quot;type&quot;:4,&quot;level&quot;:1,&quot;color&quot;:1,&quot;term&quot;:0,&quot;trait&quot;:0,&quot;legacy&quot;:3,&quot;orderTable&quot;:99,&quot;orderDeck&quot;:346}," calcext:value-type="string">
            <text:p>{"id":"1-60","name":"髭切","kana":"ひげきり","traitText":null,"ruleText":"イジン召喚によってイジンが自分の戦場に置かれる際、魔力ゾーンに置かれているこれを、そのイジンに装備させてもよい。¶装備 : 「特性：剣術」 アタック+1000","legacyText":"復元","imageUrl":"https://one-draw.jp/ijinden/cardlist/001/card/01_060.png","expansion":15,"rarity":1,"type":4,"level":1,"color":1,"term":0,"trait":0,"legacy":3,"orderTable":99,"orderDeck":346},</text:p>
          </table:table-cell>
          <table:table-cell table:number-columns-repeated="16347"/>
        </table:table-row>
        <table:table-row table:style-name="ro2">
          <table:table-cell office:value-type="float" office:value="100" calcext:value-type="float">
            <text:p>100</text:p>
          </table:table-cell>
          <table:table-cell office:value-type="float" office:value="379" calcext:value-type="float">
            <text:p>379</text:p>
          </table:table-cell>
          <table:table-cell office:value-type="string" calcext:value-type="string">
            <text:p>1-61</text:p>
          </table:table-cell>
          <table:table-cell office:value-type="float" office:value="61" calcext:value-type="float">
            <text:p>61</text:p>
          </table:table-cell>
          <table:table-cell office:value-type="string" calcext:value-type="string">
            <text:p>レッドオーブ</text:p>
          </table:table-cell>
          <table:table-cell office:value-type="string" calcext:value-type="string">
            <text:p>れっどおーぶ</text:p>
          </table:table-cell>
          <table:table-cell office:value-type="string" calcext:value-type="string">
            <text:p>第１弾ブースターパック</text:p>
          </table:table-cell>
          <table:table-cell table:formula="of:=VLOOKUP([.G101];[$収録番号.$A$1:$収録番号.$B$9];2;0)" office:value-type="float" office:value="15" calcext:value-type="float">
            <text:p>15</text:p>
          </table:table-cell>
          <table:table-cell office:value-type="string" calcext:value-type="string">
            <text:p>R</text:p>
          </table:table-cell>
          <table:table-cell table:formula="of:=VLOOKUP([.I101];[$レアリティ番号.$A$1:$レアリティ番号.$B$4];2;0)" office:value-type="float" office:value="2" calcext:value-type="float">
            <text:p>2</text:p>
          </table:table-cell>
          <table:table-cell office:value-type="string" calcext:value-type="string">
            <text:p>マリョク</text:p>
          </table:table-cell>
          <table:table-cell table:formula="of:=VLOOKUP([.K101];[$種類番号.$A$1:$種類番号.$B$4];2;0)" office:value-type="float" office:value="4" calcext:value-type="float">
            <text:p>4</text:p>
          </table:table-cell>
          <table:table-cell office:value-type="string" calcext:value-type="string">
            <text:p>赤</text:p>
          </table:table-cell>
          <table:table-cell table:formula="of:=VLOOKUP([.M101];[$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0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01];[$特性番号.$A$1:$特性番号.$B$8];2;0);0)" office:value-type="float" office:value="0" calcext:value-type="float">
            <text:p>0</text:p>
          </table:table-cell>
          <table:table-cell/>
          <table:table-cell table:style-name="ce8" office:value-type="string" calcext:value-type="string">
            <text:p>復元</text:p>
          </table:table-cell>
          <table:table-cell table:formula="of:=IFERROR(VLOOKUP([.$V101];[$遺業能力番号.$A$1:$遺業能力番号.$B$9];2;0);0)" office:value-type="float" office:value="3" calcext:value-type="float">
            <text:p>3</text:p>
          </table:table-cell>
          <table:table-cell office:value-type="string" calcext:value-type="string">
            <text:p>https://one-draw.jp/ijinden/cardlist/001/card/01_061.png</text:p>
          </table:table-cell>
          <table:table-cell table:formula="of:=CONCATENATE([$JSON.$A$1];[.$C101];[$JSON.$B$1];[.$E101];[$JSON.$C$1];[.$F101];[$JSON.$D$1];IF(ISNA([.$S101]);&quot;null&quot;;&quot;&quot;&quot;&quot;&amp;[.$S101]&amp;&quot;&quot;&quot;&quot;);[$JSON.$E$1];[.$U101];[$JSON.$F$1];IF(ISNA([.$V101]);&quot;null&quot;;&quot;&quot;&quot;&quot;&amp;[.$V101]&amp;&quot;&quot;&quot;&quot;);[$JSON.$G$1];[.$X101];[$JSON.$H$1];[.$H101];[$JSON.$I$1];[.J101];[$JSON.$J$1];[.$L101];[$JSON.$K$1];[.$O101];[$JSON.$L$1];[.$N101];[$JSON.$M$1];[.$R101];[$JSON.$N$1];[.$T101];[$JSON.$O$1];[.$W101];[$JSON.$P$1];[.$A101];[$JSON.$Q$1];[.$B101];[$JSON.$R$1])" office:value-type="string" office:string-value="{&quot;id&quot;:&quot;1-61&quot;,&quot;name&quot;:&quot;レッドオーブ&quot;,&quot;kana&quot;:&quot;れっどおーぶ&quot;,&quot;traitText&quot;:null,&quot;ruleText&quot;:&quot;&quot;,&quot;legacyText&quot;:&quot;復元&quot;,&quot;imageUrl&quot;:&quot;https://one-draw.jp/ijinden/cardlist/001/card/01_061.png&quot;,&quot;expansion&quot;:15,&quot;rarity&quot;:2,&quot;type&quot;:4,&quot;level&quot;:2,&quot;color&quot;:1,&quot;term&quot;:0,&quot;trait&quot;:0,&quot;legacy&quot;:3,&quot;orderTable&quot;:100,&quot;orderDeck&quot;:379}," calcext:value-type="string">
            <text:p>{"id":"1-61","name":"レッドオーブ","kana":"れっどおーぶ","traitText":null,"ruleText":"","legacyText":"復元","imageUrl":"https://one-draw.jp/ijinden/cardlist/001/card/01_061.png","expansion":15,"rarity":2,"type":4,"level":2,"color":1,"term":0,"trait":0,"legacy":3,"orderTable":100,"orderDeck":379},</text:p>
          </table:table-cell>
          <table:table-cell table:number-columns-repeated="16347"/>
        </table:table-row>
        <table:table-row table:style-name="ro2">
          <table:table-cell office:value-type="float" office:value="101" calcext:value-type="float">
            <text:p>101</text:p>
          </table:table-cell>
          <table:table-cell office:value-type="float" office:value="350" calcext:value-type="float">
            <text:p>350</text:p>
          </table:table-cell>
          <table:table-cell office:value-type="string" calcext:value-type="string">
            <text:p>1-62</text:p>
          </table:table-cell>
          <table:table-cell office:value-type="float" office:value="62" calcext:value-type="float">
            <text:p>62</text:p>
          </table:table-cell>
          <table:table-cell office:value-type="string" calcext:value-type="string">
            <text:p>ウォーターポット</text:p>
          </table:table-cell>
          <table:table-cell office:value-type="string" calcext:value-type="string">
            <text:p>うぉーたーぽっと</text:p>
          </table:table-cell>
          <table:table-cell office:value-type="string" calcext:value-type="string">
            <text:p>第１弾ブースターパック</text:p>
          </table:table-cell>
          <table:table-cell table:formula="of:=VLOOKUP([.G102];[$収録番号.$A$1:$収録番号.$B$9];2;0)" office:value-type="float" office:value="15" calcext:value-type="float">
            <text:p>15</text:p>
          </table:table-cell>
          <table:table-cell office:value-type="string" calcext:value-type="string">
            <text:p>N</text:p>
          </table:table-cell>
          <table:table-cell table:formula="of:=VLOOKUP([.I102];[$レアリティ番号.$A$1:$レアリティ番号.$B$4];2;0)" office:value-type="float" office:value="1" calcext:value-type="float">
            <text:p>1</text:p>
          </table:table-cell>
          <table:table-cell office:value-type="string" calcext:value-type="string">
            <text:p>マリョク</text:p>
          </table:table-cell>
          <table:table-cell table:formula="of:=VLOOKUP([.K102];[$種類番号.$A$1:$種類番号.$B$4];2;0)" office:value-type="float" office:value="4" calcext:value-type="float">
            <text:p>4</text:p>
          </table:table-cell>
          <table:table-cell office:value-type="string" calcext:value-type="string">
            <text:p>青</text:p>
          </table:table-cell>
          <table:table-cell table:formula="of:=VLOOKUP([.M102];[$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0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02];[$特性番号.$A$1:$特性番号.$B$8];2;0);0)" office:value-type="float" office:value="0" calcext:value-type="float">
            <text:p>0</text:p>
          </table:table-cell>
          <table:table-cell office:value-type="string" calcext:value-type="string">
            <text:p>魔力ゾーンに置かれたとき、1ドローする。</text:p>
          </table:table-cell>
          <table:table-cell table:style-name="ce8" table:formula="of:=NA()" office:value-type="string" office:string-value="" calcext:value-type="error">
            <text:p>#N/A</text:p>
          </table:table-cell>
          <table:table-cell table:formula="of:=IFERROR(VLOOKUP([.$V102];[$遺業能力番号.$A$1:$遺業能力番号.$B$9];2;0);0)" office:value-type="float" office:value="0" calcext:value-type="float">
            <text:p>0</text:p>
          </table:table-cell>
          <table:table-cell office:value-type="string" calcext:value-type="string">
            <text:p>https://one-draw.jp/ijinden/cardlist/001/card/01_062.png</text:p>
          </table:table-cell>
          <table:table-cell table:formula="of:=CONCATENATE([$JSON.$A$1];[.$C102];[$JSON.$B$1];[.$E102];[$JSON.$C$1];[.$F102];[$JSON.$D$1];IF(ISNA([.$S102]);&quot;null&quot;;&quot;&quot;&quot;&quot;&amp;[.$S102]&amp;&quot;&quot;&quot;&quot;);[$JSON.$E$1];[.$U102];[$JSON.$F$1];IF(ISNA([.$V102]);&quot;null&quot;;&quot;&quot;&quot;&quot;&amp;[.$V102]&amp;&quot;&quot;&quot;&quot;);[$JSON.$G$1];[.$X102];[$JSON.$H$1];[.$H102];[$JSON.$I$1];[.J102];[$JSON.$J$1];[.$L102];[$JSON.$K$1];[.$O102];[$JSON.$L$1];[.$N102];[$JSON.$M$1];[.$R102];[$JSON.$N$1];[.$T102];[$JSON.$O$1];[.$W102];[$JSON.$P$1];[.$A102];[$JSON.$Q$1];[.$B102];[$JSON.$R$1])" office:value-type="string" office:string-value="{&quot;id&quot;:&quot;1-62&quot;,&quot;name&quot;:&quot;ウォーターポット&quot;,&quot;kana&quot;:&quot;うぉーたーぽっと&quot;,&quot;traitText&quot;:null,&quot;ruleText&quot;:&quot;魔力ゾーンに置かれたとき、1ドローする。&quot;,&quot;legacyText&quot;:null,&quot;imageUrl&quot;:&quot;https://one-draw.jp/ijinden/cardlist/001/card/01_062.png&quot;,&quot;expansion&quot;:15,&quot;rarity&quot;:1,&quot;type&quot;:4,&quot;level&quot;:1,&quot;color&quot;:2,&quot;term&quot;:0,&quot;trait&quot;:0,&quot;legacy&quot;:0,&quot;orderTable&quot;:101,&quot;orderDeck&quot;:350}," calcext:value-type="string">
            <text:p>{"id":"1-62","name":"ウォーターポット","kana":"うぉーたーぽっと","traitText":null,"ruleText":"魔力ゾーンに置かれたとき、1ドローする。","legacyText":null,"imageUrl":"https://one-draw.jp/ijinden/cardlist/001/card/01_062.png","expansion":15,"rarity":1,"type":4,"level":1,"color":2,"term":0,"trait":0,"legacy":0,"orderTable":101,"orderDeck":350},</text:p>
          </table:table-cell>
          <table:table-cell table:number-columns-repeated="16347"/>
        </table:table-row>
        <table:table-row table:style-name="ro2">
          <table:table-cell office:value-type="float" office:value="102" calcext:value-type="float">
            <text:p>102</text:p>
          </table:table-cell>
          <table:table-cell office:value-type="float" office:value="351" calcext:value-type="float">
            <text:p>351</text:p>
          </table:table-cell>
          <table:table-cell office:value-type="string" calcext:value-type="string">
            <text:p>1-63</text:p>
          </table:table-cell>
          <table:table-cell office:value-type="float" office:value="63" calcext:value-type="float">
            <text:p>63</text:p>
          </table:table-cell>
          <table:table-cell office:value-type="string" calcext:value-type="string">
            <text:p>アイスソード</text:p>
          </table:table-cell>
          <table:table-cell office:value-type="string" calcext:value-type="string">
            <text:p>あいすそーど</text:p>
          </table:table-cell>
          <table:table-cell office:value-type="string" calcext:value-type="string">
            <text:p>第１弾ブースターパック</text:p>
          </table:table-cell>
          <table:table-cell table:formula="of:=VLOOKUP([.G103];[$収録番号.$A$1:$収録番号.$B$9];2;0)" office:value-type="float" office:value="15" calcext:value-type="float">
            <text:p>15</text:p>
          </table:table-cell>
          <table:table-cell office:value-type="string" calcext:value-type="string">
            <text:p>N</text:p>
          </table:table-cell>
          <table:table-cell table:formula="of:=VLOOKUP([.I103];[$レアリティ番号.$A$1:$レアリティ番号.$B$4];2;0)" office:value-type="float" office:value="1" calcext:value-type="float">
            <text:p>1</text:p>
          </table:table-cell>
          <table:table-cell office:value-type="string" calcext:value-type="string">
            <text:p>マリョク</text:p>
          </table:table-cell>
          <table:table-cell table:formula="of:=VLOOKUP([.K103];[$種類番号.$A$1:$種類番号.$B$4];2;0)" office:value-type="float" office:value="4" calcext:value-type="float">
            <text:p>4</text:p>
          </table:table-cell>
          <table:table-cell office:value-type="string" calcext:value-type="string">
            <text:p>青</text:p>
          </table:table-cell>
          <table:table-cell table:formula="of:=VLOOKUP([.M103];[$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0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03];[$特性番号.$A$1:$特性番号.$B$8];2;0);0)" office:value-type="float" office:value="0" calcext:value-type="float">
            <text:p>0</text:p>
          </table:table-cell>
          <table:table-cell office:value-type="string" calcext:value-type="string">
            <text:p>イジン召喚によってイジンが自分の戦場に置かれる際、魔力ゾーンに置かれているこれを、そのイジンに装備させてもよい。¶装備 : ブロック+2000</text:p>
          </table:table-cell>
          <table:table-cell table:style-name="ce8" table:formula="of:=NA()" office:value-type="string" office:string-value="" calcext:value-type="error">
            <text:p>#N/A</text:p>
          </table:table-cell>
          <table:table-cell table:formula="of:=IFERROR(VLOOKUP([.$V103];[$遺業能力番号.$A$1:$遺業能力番号.$B$9];2;0);0)" office:value-type="float" office:value="0" calcext:value-type="float">
            <text:p>0</text:p>
          </table:table-cell>
          <table:table-cell office:value-type="string" calcext:value-type="string">
            <text:p>https://one-draw.jp/ijinden/cardlist/001/card/01_063.png</text:p>
          </table:table-cell>
          <table:table-cell table:formula="of:=CONCATENATE([$JSON.$A$1];[.$C103];[$JSON.$B$1];[.$E103];[$JSON.$C$1];[.$F103];[$JSON.$D$1];IF(ISNA([.$S103]);&quot;null&quot;;&quot;&quot;&quot;&quot;&amp;[.$S103]&amp;&quot;&quot;&quot;&quot;);[$JSON.$E$1];[.$U103];[$JSON.$F$1];IF(ISNA([.$V103]);&quot;null&quot;;&quot;&quot;&quot;&quot;&amp;[.$V103]&amp;&quot;&quot;&quot;&quot;);[$JSON.$G$1];[.$X103];[$JSON.$H$1];[.$H103];[$JSON.$I$1];[.J103];[$JSON.$J$1];[.$L103];[$JSON.$K$1];[.$O103];[$JSON.$L$1];[.$N103];[$JSON.$M$1];[.$R103];[$JSON.$N$1];[.$T103];[$JSON.$O$1];[.$W103];[$JSON.$P$1];[.$A103];[$JSON.$Q$1];[.$B103];[$JSON.$R$1])" office:value-type="string" office:string-value="{&quot;id&quot;:&quot;1-63&quot;,&quot;name&quot;:&quot;アイスソード&quot;,&quot;kana&quot;:&quot;あいすそーど&quot;,&quot;traitText&quot;:null,&quot;ruleText&quot;:&quot;イジン召喚によってイジンが自分の戦場に置かれる際、魔力ゾーンに置かれているこれを、そのイジンに装備させてもよい。¶装備 : ブロック+2000&quot;,&quot;legacyText&quot;:null,&quot;imageUrl&quot;:&quot;https://one-draw.jp/ijinden/cardlist/001/card/01_063.png&quot;,&quot;expansion&quot;:15,&quot;rarity&quot;:1,&quot;type&quot;:4,&quot;level&quot;:1,&quot;color&quot;:2,&quot;term&quot;:0,&quot;trait&quot;:0,&quot;legacy&quot;:0,&quot;orderTable&quot;:102,&quot;orderDeck&quot;:351}," calcext:value-type="string">
            <text:p>{"id":"1-63","name":"アイスソード","kana":"あいすそーど","traitText":null,"ruleText":"イジン召喚によってイジンが自分の戦場に置かれる際、魔力ゾーンに置かれているこれを、そのイジンに装備させてもよい。¶装備 : ブロック+2000","legacyText":null,"imageUrl":"https://one-draw.jp/ijinden/cardlist/001/card/01_063.png","expansion":15,"rarity":1,"type":4,"level":1,"color":2,"term":0,"trait":0,"legacy":0,"orderTable":102,"orderDeck":351},</text:p>
          </table:table-cell>
          <table:table-cell table:number-columns-repeated="16347"/>
        </table:table-row>
        <table:table-row table:style-name="ro2">
          <table:table-cell office:value-type="float" office:value="103" calcext:value-type="float">
            <text:p>103</text:p>
          </table:table-cell>
          <table:table-cell office:value-type="float" office:value="352" calcext:value-type="float">
            <text:p>352</text:p>
          </table:table-cell>
          <table:table-cell office:value-type="string" calcext:value-type="string">
            <text:p>1-64</text:p>
          </table:table-cell>
          <table:table-cell office:value-type="float" office:value="64" calcext:value-type="float">
            <text:p>64</text:p>
          </table:table-cell>
          <table:table-cell office:value-type="string" calcext:value-type="string">
            <text:p>羅針盤</text:p>
          </table:table-cell>
          <table:table-cell office:value-type="string" calcext:value-type="string">
            <text:p>らしんばん</text:p>
          </table:table-cell>
          <table:table-cell office:value-type="string" calcext:value-type="string">
            <text:p>第１弾ブースターパック</text:p>
          </table:table-cell>
          <table:table-cell table:formula="of:=VLOOKUP([.G104];[$収録番号.$A$1:$収録番号.$B$9];2;0)" office:value-type="float" office:value="15" calcext:value-type="float">
            <text:p>15</text:p>
          </table:table-cell>
          <table:table-cell office:value-type="string" calcext:value-type="string">
            <text:p>N</text:p>
          </table:table-cell>
          <table:table-cell table:formula="of:=VLOOKUP([.I104];[$レアリティ番号.$A$1:$レアリティ番号.$B$4];2;0)" office:value-type="float" office:value="1" calcext:value-type="float">
            <text:p>1</text:p>
          </table:table-cell>
          <table:table-cell office:value-type="string" calcext:value-type="string">
            <text:p>マリョク</text:p>
          </table:table-cell>
          <table:table-cell table:formula="of:=VLOOKUP([.K104];[$種類番号.$A$1:$種類番号.$B$4];2;0)" office:value-type="float" office:value="4" calcext:value-type="float">
            <text:p>4</text:p>
          </table:table-cell>
          <table:table-cell office:value-type="string" calcext:value-type="string">
            <text:p>青</text:p>
          </table:table-cell>
          <table:table-cell table:formula="of:=VLOOKUP([.M104];[$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0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04];[$特性番号.$A$1:$特性番号.$B$8];2;0);0)" office:value-type="float" office:value="0" calcext:value-type="float">
            <text:p>0</text:p>
          </table:table-cell>
          <table:table-cell office:value-type="string" calcext:value-type="string">
            <text:p>イジン召喚によって「航海」を持つイジンが自分の戦場に置かれる際、魔力ゾーンに置かれているこれを、そのイジンに装備させてもよい。¶装備 : 破壊されたとき、自分の魔力ゾーンのマリョク1つを墓地に置いて発動できる。これを破壊されていない状態にする。</text:p>
          </table:table-cell>
          <table:table-cell table:style-name="ce8" office:value-type="string" calcext:value-type="string">
            <text:p>復元</text:p>
          </table:table-cell>
          <table:table-cell table:formula="of:=IFERROR(VLOOKUP([.$V104];[$遺業能力番号.$A$1:$遺業能力番号.$B$9];2;0);0)" office:value-type="float" office:value="3" calcext:value-type="float">
            <text:p>3</text:p>
          </table:table-cell>
          <table:table-cell office:value-type="string" calcext:value-type="string">
            <text:p>https://one-draw.jp/ijinden/cardlist/001/card/01_064.png</text:p>
          </table:table-cell>
          <table:table-cell table:formula="of:=CONCATENATE([$JSON.$A$1];[.$C104];[$JSON.$B$1];[.$E104];[$JSON.$C$1];[.$F104];[$JSON.$D$1];IF(ISNA([.$S104]);&quot;null&quot;;&quot;&quot;&quot;&quot;&amp;[.$S104]&amp;&quot;&quot;&quot;&quot;);[$JSON.$E$1];[.$U104];[$JSON.$F$1];IF(ISNA([.$V104]);&quot;null&quot;;&quot;&quot;&quot;&quot;&amp;[.$V104]&amp;&quot;&quot;&quot;&quot;);[$JSON.$G$1];[.$X104];[$JSON.$H$1];[.$H104];[$JSON.$I$1];[.J104];[$JSON.$J$1];[.$L104];[$JSON.$K$1];[.$O104];[$JSON.$L$1];[.$N104];[$JSON.$M$1];[.$R104];[$JSON.$N$1];[.$T104];[$JSON.$O$1];[.$W104];[$JSON.$P$1];[.$A104];[$JSON.$Q$1];[.$B104];[$JSON.$R$1])" office:value-type="string" office:string-value="{&quot;id&quot;:&quot;1-64&quot;,&quot;name&quot;:&quot;羅針盤&quot;,&quot;kana&quot;:&quot;らしんばん&quot;,&quot;traitText&quot;:null,&quot;ruleText&quot;:&quot;イジン召喚によって「航海」を持つイジンが自分の戦場に置かれる際、魔力ゾーンに置かれているこれを、そのイジンに装備させてもよい。¶装備 : 破壊されたとき、自分の魔力ゾーンのマリョク1つを墓地に置いて発動できる。これを破壊されていない状態にする。&quot;,&quot;legacyText&quot;:&quot;復元&quot;,&quot;imageUrl&quot;:&quot;https://one-draw.jp/ijinden/cardlist/001/card/01_064.png&quot;,&quot;expansion&quot;:15,&quot;rarity&quot;:1,&quot;type&quot;:4,&quot;level&quot;:1,&quot;color&quot;:2,&quot;term&quot;:0,&quot;trait&quot;:0,&quot;legacy&quot;:3,&quot;orderTable&quot;:103,&quot;orderDeck&quot;:352}," calcext:value-type="string">
            <text:p>{"id":"1-64","name":"羅針盤","kana":"らしんばん","traitText":null,"ruleText":"イジン召喚によって「航海」を持つイジンが自分の戦場に置かれる際、魔力ゾーンに置かれているこれを、そのイジンに装備させてもよい。¶装備 : 破壊されたとき、自分の魔力ゾーンのマリョク1つを墓地に置いて発動できる。これを破壊されていない状態にする。","legacyText":"復元","imageUrl":"https://one-draw.jp/ijinden/cardlist/001/card/01_064.png","expansion":15,"rarity":1,"type":4,"level":1,"color":2,"term":0,"trait":0,"legacy":3,"orderTable":103,"orderDeck":352},</text:p>
          </table:table-cell>
          <table:table-cell table:number-columns-repeated="16347"/>
        </table:table-row>
        <table:table-row table:style-name="ro2">
          <table:table-cell office:value-type="float" office:value="104" calcext:value-type="float">
            <text:p>104</text:p>
          </table:table-cell>
          <table:table-cell office:value-type="float" office:value="380" calcext:value-type="float">
            <text:p>380</text:p>
          </table:table-cell>
          <table:table-cell office:value-type="string" calcext:value-type="string">
            <text:p>1-65</text:p>
          </table:table-cell>
          <table:table-cell office:value-type="float" office:value="65" calcext:value-type="float">
            <text:p>65</text:p>
          </table:table-cell>
          <table:table-cell office:value-type="string" calcext:value-type="string">
            <text:p>ブルーオーブ</text:p>
          </table:table-cell>
          <table:table-cell office:value-type="string" calcext:value-type="string">
            <text:p>ぶるーおーぶ</text:p>
          </table:table-cell>
          <table:table-cell office:value-type="string" calcext:value-type="string">
            <text:p>第１弾ブースターパック</text:p>
          </table:table-cell>
          <table:table-cell table:formula="of:=VLOOKUP([.G105];[$収録番号.$A$1:$収録番号.$B$9];2;0)" office:value-type="float" office:value="15" calcext:value-type="float">
            <text:p>15</text:p>
          </table:table-cell>
          <table:table-cell office:value-type="string" calcext:value-type="string">
            <text:p>R</text:p>
          </table:table-cell>
          <table:table-cell table:formula="of:=VLOOKUP([.I105];[$レアリティ番号.$A$1:$レアリティ番号.$B$4];2;0)" office:value-type="float" office:value="2" calcext:value-type="float">
            <text:p>2</text:p>
          </table:table-cell>
          <table:table-cell office:value-type="string" calcext:value-type="string">
            <text:p>マリョク</text:p>
          </table:table-cell>
          <table:table-cell table:formula="of:=VLOOKUP([.K105];[$種類番号.$A$1:$種類番号.$B$4];2;0)" office:value-type="float" office:value="4" calcext:value-type="float">
            <text:p>4</text:p>
          </table:table-cell>
          <table:table-cell office:value-type="string" calcext:value-type="string">
            <text:p>青</text:p>
          </table:table-cell>
          <table:table-cell table:formula="of:=VLOOKUP([.M105];[$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0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05];[$特性番号.$A$1:$特性番号.$B$8];2;0);0)" office:value-type="float" office:value="0" calcext:value-type="float">
            <text:p>0</text:p>
          </table:table-cell>
          <table:table-cell/>
          <table:table-cell table:style-name="ce8" office:value-type="string" calcext:value-type="string">
            <text:p>復元</text:p>
          </table:table-cell>
          <table:table-cell table:formula="of:=IFERROR(VLOOKUP([.$V105];[$遺業能力番号.$A$1:$遺業能力番号.$B$9];2;0);0)" office:value-type="float" office:value="3" calcext:value-type="float">
            <text:p>3</text:p>
          </table:table-cell>
          <table:table-cell office:value-type="string" calcext:value-type="string">
            <text:p>https://one-draw.jp/ijinden/cardlist/001/card/01_065.png</text:p>
          </table:table-cell>
          <table:table-cell table:formula="of:=CONCATENATE([$JSON.$A$1];[.$C105];[$JSON.$B$1];[.$E105];[$JSON.$C$1];[.$F105];[$JSON.$D$1];IF(ISNA([.$S105]);&quot;null&quot;;&quot;&quot;&quot;&quot;&amp;[.$S105]&amp;&quot;&quot;&quot;&quot;);[$JSON.$E$1];[.$U105];[$JSON.$F$1];IF(ISNA([.$V105]);&quot;null&quot;;&quot;&quot;&quot;&quot;&amp;[.$V105]&amp;&quot;&quot;&quot;&quot;);[$JSON.$G$1];[.$X105];[$JSON.$H$1];[.$H105];[$JSON.$I$1];[.J105];[$JSON.$J$1];[.$L105];[$JSON.$K$1];[.$O105];[$JSON.$L$1];[.$N105];[$JSON.$M$1];[.$R105];[$JSON.$N$1];[.$T105];[$JSON.$O$1];[.$W105];[$JSON.$P$1];[.$A105];[$JSON.$Q$1];[.$B105];[$JSON.$R$1])" office:value-type="string" office:string-value="{&quot;id&quot;:&quot;1-65&quot;,&quot;name&quot;:&quot;ブルーオーブ&quot;,&quot;kana&quot;:&quot;ぶるーおーぶ&quot;,&quot;traitText&quot;:null,&quot;ruleText&quot;:&quot;&quot;,&quot;legacyText&quot;:&quot;復元&quot;,&quot;imageUrl&quot;:&quot;https://one-draw.jp/ijinden/cardlist/001/card/01_065.png&quot;,&quot;expansion&quot;:15,&quot;rarity&quot;:2,&quot;type&quot;:4,&quot;level&quot;:2,&quot;color&quot;:2,&quot;term&quot;:0,&quot;trait&quot;:0,&quot;legacy&quot;:3,&quot;orderTable&quot;:104,&quot;orderDeck&quot;:380}," calcext:value-type="string">
            <text:p>{"id":"1-65","name":"ブルーオーブ","kana":"ぶるーおーぶ","traitText":null,"ruleText":"","legacyText":"復元","imageUrl":"https://one-draw.jp/ijinden/cardlist/001/card/01_065.png","expansion":15,"rarity":2,"type":4,"level":2,"color":2,"term":0,"trait":0,"legacy":3,"orderTable":104,"orderDeck":380},</text:p>
          </table:table-cell>
          <table:table-cell table:number-columns-repeated="16347"/>
        </table:table-row>
        <table:table-row table:style-name="ro2">
          <table:table-cell office:value-type="float" office:value="105" calcext:value-type="float">
            <text:p>105</text:p>
          </table:table-cell>
          <table:table-cell office:value-type="float" office:value="356" calcext:value-type="float">
            <text:p>356</text:p>
          </table:table-cell>
          <table:table-cell office:value-type="string" calcext:value-type="string">
            <text:p>1-66</text:p>
          </table:table-cell>
          <table:table-cell office:value-type="float" office:value="66" calcext:value-type="float">
            <text:p>66</text:p>
          </table:table-cell>
          <table:table-cell office:value-type="string" calcext:value-type="string">
            <text:p>ポプリ</text:p>
          </table:table-cell>
          <table:table-cell office:value-type="string" calcext:value-type="string">
            <text:p>ぽぷり</text:p>
          </table:table-cell>
          <table:table-cell office:value-type="string" calcext:value-type="string">
            <text:p>第１弾ブースターパック</text:p>
          </table:table-cell>
          <table:table-cell table:formula="of:=VLOOKUP([.G106];[$収録番号.$A$1:$収録番号.$B$9];2;0)" office:value-type="float" office:value="15" calcext:value-type="float">
            <text:p>15</text:p>
          </table:table-cell>
          <table:table-cell office:value-type="string" calcext:value-type="string">
            <text:p>N</text:p>
          </table:table-cell>
          <table:table-cell table:formula="of:=VLOOKUP([.I106];[$レアリティ番号.$A$1:$レアリティ番号.$B$4];2;0)" office:value-type="float" office:value="1" calcext:value-type="float">
            <text:p>1</text:p>
          </table:table-cell>
          <table:table-cell office:value-type="string" calcext:value-type="string">
            <text:p>マリョク</text:p>
          </table:table-cell>
          <table:table-cell table:formula="of:=VLOOKUP([.K106];[$種類番号.$A$1:$種類番号.$B$4];2;0)" office:value-type="float" office:value="4" calcext:value-type="float">
            <text:p>4</text:p>
          </table:table-cell>
          <table:table-cell office:value-type="string" calcext:value-type="string">
            <text:p>緑</text:p>
          </table:table-cell>
          <table:table-cell table:formula="of:=VLOOKUP([.M106];[$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0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06];[$特性番号.$A$1:$特性番号.$B$8];2;0);0)" office:value-type="float" office:value="0" calcext:value-type="float">
            <text:p>0</text:p>
          </table:table-cell>
          <table:table-cell office:value-type="string" calcext:value-type="string">
            <text:p>魔力ゾーンに置かれたとき、1ドローする。</text:p>
          </table:table-cell>
          <table:table-cell table:style-name="ce8" table:formula="of:=NA()" office:value-type="string" office:string-value="" calcext:value-type="error">
            <text:p>#N/A</text:p>
          </table:table-cell>
          <table:table-cell table:formula="of:=IFERROR(VLOOKUP([.$V106];[$遺業能力番号.$A$1:$遺業能力番号.$B$9];2;0);0)" office:value-type="float" office:value="0" calcext:value-type="float">
            <text:p>0</text:p>
          </table:table-cell>
          <table:table-cell office:value-type="string" calcext:value-type="string">
            <text:p>https://one-draw.jp/ijinden/cardlist/001/card/01_066.png</text:p>
          </table:table-cell>
          <table:table-cell table:formula="of:=CONCATENATE([$JSON.$A$1];[.$C106];[$JSON.$B$1];[.$E106];[$JSON.$C$1];[.$F106];[$JSON.$D$1];IF(ISNA([.$S106]);&quot;null&quot;;&quot;&quot;&quot;&quot;&amp;[.$S106]&amp;&quot;&quot;&quot;&quot;);[$JSON.$E$1];[.$U106];[$JSON.$F$1];IF(ISNA([.$V106]);&quot;null&quot;;&quot;&quot;&quot;&quot;&amp;[.$V106]&amp;&quot;&quot;&quot;&quot;);[$JSON.$G$1];[.$X106];[$JSON.$H$1];[.$H106];[$JSON.$I$1];[.J106];[$JSON.$J$1];[.$L106];[$JSON.$K$1];[.$O106];[$JSON.$L$1];[.$N106];[$JSON.$M$1];[.$R106];[$JSON.$N$1];[.$T106];[$JSON.$O$1];[.$W106];[$JSON.$P$1];[.$A106];[$JSON.$Q$1];[.$B106];[$JSON.$R$1])" office:value-type="string" office:string-value="{&quot;id&quot;:&quot;1-66&quot;,&quot;name&quot;:&quot;ポプリ&quot;,&quot;kana&quot;:&quot;ぽぷり&quot;,&quot;traitText&quot;:null,&quot;ruleText&quot;:&quot;魔力ゾーンに置かれたとき、1ドローする。&quot;,&quot;legacyText&quot;:null,&quot;imageUrl&quot;:&quot;https://one-draw.jp/ijinden/cardlist/001/card/01_066.png&quot;,&quot;expansion&quot;:15,&quot;rarity&quot;:1,&quot;type&quot;:4,&quot;level&quot;:1,&quot;color&quot;:4,&quot;term&quot;:0,&quot;trait&quot;:0,&quot;legacy&quot;:0,&quot;orderTable&quot;:105,&quot;orderDeck&quot;:356}," calcext:value-type="string">
            <text:p>{"id":"1-66","name":"ポプリ","kana":"ぽぷり","traitText":null,"ruleText":"魔力ゾーンに置かれたとき、1ドローする。","legacyText":null,"imageUrl":"https://one-draw.jp/ijinden/cardlist/001/card/01_066.png","expansion":15,"rarity":1,"type":4,"level":1,"color":4,"term":0,"trait":0,"legacy":0,"orderTable":105,"orderDeck":356},</text:p>
          </table:table-cell>
          <table:table-cell table:number-columns-repeated="16347"/>
        </table:table-row>
        <table:table-row table:style-name="ro2">
          <table:table-cell office:value-type="float" office:value="106" calcext:value-type="float">
            <text:p>106</text:p>
          </table:table-cell>
          <table:table-cell office:value-type="float" office:value="357" calcext:value-type="float">
            <text:p>357</text:p>
          </table:table-cell>
          <table:table-cell office:value-type="string" calcext:value-type="string">
            <text:p>1-67</text:p>
          </table:table-cell>
          <table:table-cell office:value-type="float" office:value="67" calcext:value-type="float">
            <text:p>67</text:p>
          </table:table-cell>
          <table:table-cell office:value-type="string" calcext:value-type="string">
            <text:p>ウッドスタッフ</text:p>
          </table:table-cell>
          <table:table-cell office:value-type="string" calcext:value-type="string">
            <text:p>うっどすたっふ</text:p>
          </table:table-cell>
          <table:table-cell office:value-type="string" calcext:value-type="string">
            <text:p>第１弾ブースターパック</text:p>
          </table:table-cell>
          <table:table-cell table:formula="of:=VLOOKUP([.G107];[$収録番号.$A$1:$収録番号.$B$9];2;0)" office:value-type="float" office:value="15" calcext:value-type="float">
            <text:p>15</text:p>
          </table:table-cell>
          <table:table-cell office:value-type="string" calcext:value-type="string">
            <text:p>N</text:p>
          </table:table-cell>
          <table:table-cell table:formula="of:=VLOOKUP([.I107];[$レアリティ番号.$A$1:$レアリティ番号.$B$4];2;0)" office:value-type="float" office:value="1" calcext:value-type="float">
            <text:p>1</text:p>
          </table:table-cell>
          <table:table-cell office:value-type="string" calcext:value-type="string">
            <text:p>マリョク</text:p>
          </table:table-cell>
          <table:table-cell table:formula="of:=VLOOKUP([.K107];[$種類番号.$A$1:$種類番号.$B$4];2;0)" office:value-type="float" office:value="4" calcext:value-type="float">
            <text:p>4</text:p>
          </table:table-cell>
          <table:table-cell office:value-type="string" calcext:value-type="string">
            <text:p>緑</text:p>
          </table:table-cell>
          <table:table-cell table:formula="of:=VLOOKUP([.M107];[$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0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07];[$特性番号.$A$1:$特性番号.$B$8];2;0);0)" office:value-type="float" office:value="0" calcext:value-type="float">
            <text:p>0</text:p>
          </table:table-cell>
          <table:table-cell office:value-type="string" calcext:value-type="string">
            <text:p>イジン召喚によってイジンが自分の戦場に置かれる際、魔力ゾーンに置かれているこれを、そのイジンに装備させてもよい。¶装備 : パワー+1000</text:p>
          </table:table-cell>
          <table:table-cell table:style-name="ce8" table:formula="of:=NA()" office:value-type="string" office:string-value="" calcext:value-type="error">
            <text:p>#N/A</text:p>
          </table:table-cell>
          <table:table-cell table:formula="of:=IFERROR(VLOOKUP([.$V107];[$遺業能力番号.$A$1:$遺業能力番号.$B$9];2;0);0)" office:value-type="float" office:value="0" calcext:value-type="float">
            <text:p>0</text:p>
          </table:table-cell>
          <table:table-cell office:value-type="string" calcext:value-type="string">
            <text:p>https://one-draw.jp/ijinden/cardlist/001/card/01_067.png</text:p>
          </table:table-cell>
          <table:table-cell table:formula="of:=CONCATENATE([$JSON.$A$1];[.$C107];[$JSON.$B$1];[.$E107];[$JSON.$C$1];[.$F107];[$JSON.$D$1];IF(ISNA([.$S107]);&quot;null&quot;;&quot;&quot;&quot;&quot;&amp;[.$S107]&amp;&quot;&quot;&quot;&quot;);[$JSON.$E$1];[.$U107];[$JSON.$F$1];IF(ISNA([.$V107]);&quot;null&quot;;&quot;&quot;&quot;&quot;&amp;[.$V107]&amp;&quot;&quot;&quot;&quot;);[$JSON.$G$1];[.$X107];[$JSON.$H$1];[.$H107];[$JSON.$I$1];[.J107];[$JSON.$J$1];[.$L107];[$JSON.$K$1];[.$O107];[$JSON.$L$1];[.$N107];[$JSON.$M$1];[.$R107];[$JSON.$N$1];[.$T107];[$JSON.$O$1];[.$W107];[$JSON.$P$1];[.$A107];[$JSON.$Q$1];[.$B107];[$JSON.$R$1])" office:value-type="string" office:string-value="{&quot;id&quot;:&quot;1-67&quot;,&quot;name&quot;:&quot;ウッドスタッフ&quot;,&quot;kana&quot;:&quot;うっどすたっふ&quot;,&quot;traitText&quot;:null,&quot;ruleText&quot;:&quot;イジン召喚によってイジンが自分の戦場に置かれる際、魔力ゾーンに置かれているこれを、そのイジンに装備させてもよい。¶装備 : パワー+1000&quot;,&quot;legacyText&quot;:null,&quot;imageUrl&quot;:&quot;https://one-draw.jp/ijinden/cardlist/001/card/01_067.png&quot;,&quot;expansion&quot;:15,&quot;rarity&quot;:1,&quot;type&quot;:4,&quot;level&quot;:1,&quot;color&quot;:4,&quot;term&quot;:0,&quot;trait&quot;:0,&quot;legacy&quot;:0,&quot;orderTable&quot;:106,&quot;orderDeck&quot;:357}," calcext:value-type="string">
            <text:p>{"id":"1-67","name":"ウッドスタッフ","kana":"うっどすたっふ","traitText":null,"ruleText":"イジン召喚によってイジンが自分の戦場に置かれる際、魔力ゾーンに置かれているこれを、そのイジンに装備させてもよい。¶装備 : パワー+1000","legacyText":null,"imageUrl":"https://one-draw.jp/ijinden/cardlist/001/card/01_067.png","expansion":15,"rarity":1,"type":4,"level":1,"color":4,"term":0,"trait":0,"legacy":0,"orderTable":106,"orderDeck":357},</text:p>
          </table:table-cell>
          <table:table-cell table:number-columns-repeated="16347"/>
        </table:table-row>
        <table:table-row table:style-name="ro2">
          <table:table-cell office:value-type="float" office:value="107" calcext:value-type="float">
            <text:p>107</text:p>
          </table:table-cell>
          <table:table-cell office:value-type="float" office:value="358" calcext:value-type="float">
            <text:p>358</text:p>
          </table:table-cell>
          <table:table-cell office:value-type="string" calcext:value-type="string">
            <text:p>1-68</text:p>
          </table:table-cell>
          <table:table-cell office:value-type="float" office:value="68" calcext:value-type="float">
            <text:p>68</text:p>
          </table:table-cell>
          <table:table-cell office:value-type="string" calcext:value-type="string">
            <text:p>万葉集</text:p>
          </table:table-cell>
          <table:table-cell office:value-type="string" calcext:value-type="string">
            <text:p>まんようしゅう</text:p>
          </table:table-cell>
          <table:table-cell office:value-type="string" calcext:value-type="string">
            <text:p>第１弾ブースターパック</text:p>
          </table:table-cell>
          <table:table-cell table:formula="of:=VLOOKUP([.G108];[$収録番号.$A$1:$収録番号.$B$9];2;0)" office:value-type="float" office:value="15" calcext:value-type="float">
            <text:p>15</text:p>
          </table:table-cell>
          <table:table-cell office:value-type="string" calcext:value-type="string">
            <text:p>N</text:p>
          </table:table-cell>
          <table:table-cell table:formula="of:=VLOOKUP([.I108];[$レアリティ番号.$A$1:$レアリティ番号.$B$4];2;0)" office:value-type="float" office:value="1" calcext:value-type="float">
            <text:p>1</text:p>
          </table:table-cell>
          <table:table-cell office:value-type="string" calcext:value-type="string">
            <text:p>マリョク</text:p>
          </table:table-cell>
          <table:table-cell table:formula="of:=VLOOKUP([.K108];[$種類番号.$A$1:$種類番号.$B$4];2;0)" office:value-type="float" office:value="4" calcext:value-type="float">
            <text:p>4</text:p>
          </table:table-cell>
          <table:table-cell office:value-type="string" calcext:value-type="string">
            <text:p>緑</text:p>
          </table:table-cell>
          <table:table-cell table:formula="of:=VLOOKUP([.M108];[$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0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08];[$特性番号.$A$1:$特性番号.$B$8];2;0);0)" office:value-type="float" office:value="0" calcext:value-type="float">
            <text:p>0</text:p>
          </table:table-cell>
          <table:table-cell office:value-type="string" calcext:value-type="string">
            <text:p>イジン召喚によって「執筆」を持つイジンが自分の戦場に置かれる際、魔力ゾーンに置かれているこれを、そのイジンに装備させてもよい。¶装備 : これが戦場にいる間、自分の魔力ゾーンの合計レベル+2する。</text:p>
          </table:table-cell>
          <table:table-cell table:style-name="ce8" office:value-type="string" calcext:value-type="string">
            <text:p>復元</text:p>
          </table:table-cell>
          <table:table-cell table:formula="of:=IFERROR(VLOOKUP([.$V108];[$遺業能力番号.$A$1:$遺業能力番号.$B$9];2;0);0)" office:value-type="float" office:value="3" calcext:value-type="float">
            <text:p>3</text:p>
          </table:table-cell>
          <table:table-cell office:value-type="string" calcext:value-type="string">
            <text:p>https://one-draw.jp/ijinden/cardlist/001/card/01_068.png</text:p>
          </table:table-cell>
          <table:table-cell table:formula="of:=CONCATENATE([$JSON.$A$1];[.$C108];[$JSON.$B$1];[.$E108];[$JSON.$C$1];[.$F108];[$JSON.$D$1];IF(ISNA([.$S108]);&quot;null&quot;;&quot;&quot;&quot;&quot;&amp;[.$S108]&amp;&quot;&quot;&quot;&quot;);[$JSON.$E$1];[.$U108];[$JSON.$F$1];IF(ISNA([.$V108]);&quot;null&quot;;&quot;&quot;&quot;&quot;&amp;[.$V108]&amp;&quot;&quot;&quot;&quot;);[$JSON.$G$1];[.$X108];[$JSON.$H$1];[.$H108];[$JSON.$I$1];[.J108];[$JSON.$J$1];[.$L108];[$JSON.$K$1];[.$O108];[$JSON.$L$1];[.$N108];[$JSON.$M$1];[.$R108];[$JSON.$N$1];[.$T108];[$JSON.$O$1];[.$W108];[$JSON.$P$1];[.$A108];[$JSON.$Q$1];[.$B108];[$JSON.$R$1])" office:value-type="string" office:string-value="{&quot;id&quot;:&quot;1-68&quot;,&quot;name&quot;:&quot;万葉集&quot;,&quot;kana&quot;:&quot;まんようしゅう&quot;,&quot;traitText&quot;:null,&quot;ruleText&quot;:&quot;イジン召喚によって「執筆」を持つイジンが自分の戦場に置かれる際、魔力ゾーンに置かれているこれを、そのイジンに装備させてもよい。¶装備 : これが戦場にいる間、自分の魔力ゾーンの合計レベル+2する。&quot;,&quot;legacyText&quot;:&quot;復元&quot;,&quot;imageUrl&quot;:&quot;https://one-draw.jp/ijinden/cardlist/001/card/01_068.png&quot;,&quot;expansion&quot;:15,&quot;rarity&quot;:1,&quot;type&quot;:4,&quot;level&quot;:1,&quot;color&quot;:4,&quot;term&quot;:0,&quot;trait&quot;:0,&quot;legacy&quot;:3,&quot;orderTable&quot;:107,&quot;orderDeck&quot;:358}," calcext:value-type="string">
            <text:p>{"id":"1-68","name":"万葉集","kana":"まんようしゅう","traitText":null,"ruleText":"イジン召喚によって「執筆」を持つイジンが自分の戦場に置かれる際、魔力ゾーンに置かれているこれを、そのイジンに装備させてもよい。¶装備 : これが戦場にいる間、自分の魔力ゾーンの合計レベル+2する。","legacyText":"復元","imageUrl":"https://one-draw.jp/ijinden/cardlist/001/card/01_068.png","expansion":15,"rarity":1,"type":4,"level":1,"color":4,"term":0,"trait":0,"legacy":3,"orderTable":107,"orderDeck":358},</text:p>
          </table:table-cell>
          <table:table-cell table:number-columns-repeated="16347"/>
        </table:table-row>
        <table:table-row table:style-name="ro2">
          <table:table-cell office:value-type="float" office:value="108" calcext:value-type="float">
            <text:p>108</text:p>
          </table:table-cell>
          <table:table-cell office:value-type="float" office:value="381" calcext:value-type="float">
            <text:p>381</text:p>
          </table:table-cell>
          <table:table-cell office:value-type="string" calcext:value-type="string">
            <text:p>1-69</text:p>
          </table:table-cell>
          <table:table-cell office:value-type="float" office:value="69" calcext:value-type="float">
            <text:p>69</text:p>
          </table:table-cell>
          <table:table-cell office:value-type="string" calcext:value-type="string">
            <text:p>グリーンオーブ</text:p>
          </table:table-cell>
          <table:table-cell office:value-type="string" calcext:value-type="string">
            <text:p>ぐりーんおーぶ</text:p>
          </table:table-cell>
          <table:table-cell office:value-type="string" calcext:value-type="string">
            <text:p>第１弾ブースターパック</text:p>
          </table:table-cell>
          <table:table-cell table:formula="of:=VLOOKUP([.G109];[$収録番号.$A$1:$収録番号.$B$9];2;0)" office:value-type="float" office:value="15" calcext:value-type="float">
            <text:p>15</text:p>
          </table:table-cell>
          <table:table-cell office:value-type="string" calcext:value-type="string">
            <text:p>R</text:p>
          </table:table-cell>
          <table:table-cell table:formula="of:=VLOOKUP([.I109];[$レアリティ番号.$A$1:$レアリティ番号.$B$4];2;0)" office:value-type="float" office:value="2" calcext:value-type="float">
            <text:p>2</text:p>
          </table:table-cell>
          <table:table-cell office:value-type="string" calcext:value-type="string">
            <text:p>マリョク</text:p>
          </table:table-cell>
          <table:table-cell table:formula="of:=VLOOKUP([.K109];[$種類番号.$A$1:$種類番号.$B$4];2;0)" office:value-type="float" office:value="4" calcext:value-type="float">
            <text:p>4</text:p>
          </table:table-cell>
          <table:table-cell office:value-type="string" calcext:value-type="string">
            <text:p>緑</text:p>
          </table:table-cell>
          <table:table-cell table:formula="of:=VLOOKUP([.M109];[$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0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09];[$特性番号.$A$1:$特性番号.$B$8];2;0);0)" office:value-type="float" office:value="0" calcext:value-type="float">
            <text:p>0</text:p>
          </table:table-cell>
          <table:table-cell/>
          <table:table-cell table:style-name="ce8" office:value-type="string" calcext:value-type="string">
            <text:p>復元</text:p>
          </table:table-cell>
          <table:table-cell table:formula="of:=IFERROR(VLOOKUP([.$V109];[$遺業能力番号.$A$1:$遺業能力番号.$B$9];2;0);0)" office:value-type="float" office:value="3" calcext:value-type="float">
            <text:p>3</text:p>
          </table:table-cell>
          <table:table-cell office:value-type="string" calcext:value-type="string">
            <text:p>https://one-draw.jp/ijinden/cardlist/001/card/01_069.png</text:p>
          </table:table-cell>
          <table:table-cell table:formula="of:=CONCATENATE([$JSON.$A$1];[.$C109];[$JSON.$B$1];[.$E109];[$JSON.$C$1];[.$F109];[$JSON.$D$1];IF(ISNA([.$S109]);&quot;null&quot;;&quot;&quot;&quot;&quot;&amp;[.$S109]&amp;&quot;&quot;&quot;&quot;);[$JSON.$E$1];[.$U109];[$JSON.$F$1];IF(ISNA([.$V109]);&quot;null&quot;;&quot;&quot;&quot;&quot;&amp;[.$V109]&amp;&quot;&quot;&quot;&quot;);[$JSON.$G$1];[.$X109];[$JSON.$H$1];[.$H109];[$JSON.$I$1];[.J109];[$JSON.$J$1];[.$L109];[$JSON.$K$1];[.$O109];[$JSON.$L$1];[.$N109];[$JSON.$M$1];[.$R109];[$JSON.$N$1];[.$T109];[$JSON.$O$1];[.$W109];[$JSON.$P$1];[.$A109];[$JSON.$Q$1];[.$B109];[$JSON.$R$1])" office:value-type="string" office:string-value="{&quot;id&quot;:&quot;1-69&quot;,&quot;name&quot;:&quot;グリーンオーブ&quot;,&quot;kana&quot;:&quot;ぐりーんおーぶ&quot;,&quot;traitText&quot;:null,&quot;ruleText&quot;:&quot;&quot;,&quot;legacyText&quot;:&quot;復元&quot;,&quot;imageUrl&quot;:&quot;https://one-draw.jp/ijinden/cardlist/001/card/01_069.png&quot;,&quot;expansion&quot;:15,&quot;rarity&quot;:2,&quot;type&quot;:4,&quot;level&quot;:2,&quot;color&quot;:4,&quot;term&quot;:0,&quot;trait&quot;:0,&quot;legacy&quot;:3,&quot;orderTable&quot;:108,&quot;orderDeck&quot;:381}," calcext:value-type="string">
            <text:p>{"id":"1-69","name":"グリーンオーブ","kana":"ぐりーんおーぶ","traitText":null,"ruleText":"","legacyText":"復元","imageUrl":"https://one-draw.jp/ijinden/cardlist/001/card/01_069.png","expansion":15,"rarity":2,"type":4,"level":2,"color":4,"term":0,"trait":0,"legacy":3,"orderTable":108,"orderDeck":381},</text:p>
          </table:table-cell>
          <table:table-cell table:number-columns-repeated="16347"/>
        </table:table-row>
        <table:table-row table:style-name="ro2">
          <table:table-cell office:value-type="float" office:value="109" calcext:value-type="float">
            <text:p>109</text:p>
          </table:table-cell>
          <table:table-cell office:value-type="float" office:value="68" calcext:value-type="float">
            <text:p>68</text:p>
          </table:table-cell>
          <table:table-cell office:value-type="string" calcext:value-type="string">
            <text:p>1-70</text:p>
          </table:table-cell>
          <table:table-cell office:value-type="float" office:value="70" calcext:value-type="float">
            <text:p>70</text:p>
          </table:table-cell>
          <table:table-cell office:value-type="string" calcext:value-type="string">
            <text:p>ビスマルク</text:p>
          </table:table-cell>
          <table:table-cell office:value-type="string" calcext:value-type="string">
            <text:p>びすまるく</text:p>
          </table:table-cell>
          <table:table-cell office:value-type="string" calcext:value-type="string">
            <text:p>第１弾ブースターパック</text:p>
          </table:table-cell>
          <table:table-cell table:formula="of:=VLOOKUP([.G110];[$収録番号.$A$1:$収録番号.$B$9];2;0)" office:value-type="float" office:value="15" calcext:value-type="float">
            <text:p>15</text:p>
          </table:table-cell>
          <table:table-cell office:value-type="string" calcext:value-type="string">
            <text:p>N</text:p>
          </table:table-cell>
          <table:table-cell table:formula="of:=VLOOKUP([.I110];[$レアリティ番号.$A$1:$レアリティ番号.$B$4];2;0)" office:value-type="float" office:value="1" calcext:value-type="float">
            <text:p>1</text:p>
          </table:table-cell>
          <table:table-cell office:value-type="string" calcext:value-type="string">
            <text:p>イジン</text:p>
          </table:table-cell>
          <table:table-cell table:formula="of:=VLOOKUP([.K110];[$種類番号.$A$1:$種類番号.$B$4];2;0)" office:value-type="float" office:value="1" calcext:value-type="float">
            <text:p>1</text:p>
          </table:table-cell>
          <table:table-cell office:value-type="string" calcext:value-type="string">
            <text:p>赤</text:p>
          </table:table-cell>
          <table:table-cell table:formula="of:=VLOOKUP([.M110];[$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1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10];[$特性番号.$A$1:$特性番号.$B$8];2;0);0)" office:value-type="float" office:value="0" calcext:value-type="float">
            <text:p>0</text:p>
          </table:table-cell>
          <table:table-cell office:value-type="string" calcext:value-type="string">
            <text:p>ダブルプレッシャー¶アタッカーになったとき、自分の戦場のイジン1体を破壊する。</text:p>
          </table:table-cell>
          <table:table-cell table:style-name="ce8" table:formula="of:=NA()" office:value-type="string" office:string-value="" calcext:value-type="error">
            <text:p>#N/A</text:p>
          </table:table-cell>
          <table:table-cell table:formula="of:=IFERROR(VLOOKUP([.$V110];[$遺業能力番号.$A$1:$遺業能力番号.$B$9];2;0);0)" office:value-type="float" office:value="0" calcext:value-type="float">
            <text:p>0</text:p>
          </table:table-cell>
          <table:table-cell office:value-type="string" calcext:value-type="string">
            <text:p>https://one-draw.jp/ijinden/cardlist/001/card/01_070.png</text:p>
          </table:table-cell>
          <table:table-cell table:formula="of:=CONCATENATE([$JSON.$A$1];[.$C110];[$JSON.$B$1];[.$E110];[$JSON.$C$1];[.$F110];[$JSON.$D$1];IF(ISNA([.$S110]);&quot;null&quot;;&quot;&quot;&quot;&quot;&amp;[.$S110]&amp;&quot;&quot;&quot;&quot;);[$JSON.$E$1];[.$U110];[$JSON.$F$1];IF(ISNA([.$V110]);&quot;null&quot;;&quot;&quot;&quot;&quot;&amp;[.$V110]&amp;&quot;&quot;&quot;&quot;);[$JSON.$G$1];[.$X110];[$JSON.$H$1];[.$H110];[$JSON.$I$1];[.J110];[$JSON.$J$1];[.$L110];[$JSON.$K$1];[.$O110];[$JSON.$L$1];[.$N110];[$JSON.$M$1];[.$R110];[$JSON.$N$1];[.$T110];[$JSON.$O$1];[.$W110];[$JSON.$P$1];[.$A110];[$JSON.$Q$1];[.$B110];[$JSON.$R$1])" office:value-type="string" office:string-value="{&quot;id&quot;:&quot;1-70&quot;,&quot;name&quot;:&quot;ビスマルク&quot;,&quot;kana&quot;:&quot;びすまるく&quot;,&quot;traitText&quot;:null,&quot;ruleText&quot;:&quot;ダブルプレッシャー¶アタッカーになったとき、自分の戦場のイジン1体を破壊する。&quot;,&quot;legacyText&quot;:null,&quot;imageUrl&quot;:&quot;https://one-draw.jp/ijinden/cardlist/001/card/01_070.png&quot;,&quot;expansion&quot;:15,&quot;rarity&quot;:1,&quot;type&quot;:1,&quot;level&quot;:3,&quot;color&quot;:1,&quot;term&quot;:0,&quot;trait&quot;:0,&quot;legacy&quot;:0,&quot;orderTable&quot;:109,&quot;orderDeck&quot;:68}," calcext:value-type="string">
            <text:p>{"id":"1-70","name":"ビスマルク","kana":"びすまるく","traitText":null,"ruleText":"ダブルプレッシャー¶アタッカーになったとき、自分の戦場のイジン1体を破壊する。","legacyText":null,"imageUrl":"https://one-draw.jp/ijinden/cardlist/001/card/01_070.png","expansion":15,"rarity":1,"type":1,"level":3,"color":1,"term":0,"trait":0,"legacy":0,"orderTable":109,"orderDeck":68},</text:p>
          </table:table-cell>
          <table:table-cell table:number-columns-repeated="16347"/>
        </table:table-row>
        <table:table-row table:style-name="ro2">
          <table:table-cell office:value-type="float" office:value="110" calcext:value-type="float">
            <text:p>110</text:p>
          </table:table-cell>
          <table:table-cell office:value-type="float" office:value="3" calcext:value-type="float">
            <text:p>3</text:p>
          </table:table-cell>
          <table:table-cell office:value-type="string" calcext:value-type="string">
            <text:p>1-71</text:p>
          </table:table-cell>
          <table:table-cell office:value-type="float" office:value="71" calcext:value-type="float">
            <text:p>71</text:p>
          </table:table-cell>
          <table:table-cell office:value-type="string" calcext:value-type="string">
            <text:p>ミュンツァー</text:p>
          </table:table-cell>
          <table:table-cell office:value-type="string" calcext:value-type="string">
            <text:p>みゅんつぁー</text:p>
          </table:table-cell>
          <table:table-cell office:value-type="string" calcext:value-type="string">
            <text:p>第１弾ブースターパック</text:p>
          </table:table-cell>
          <table:table-cell table:formula="of:=VLOOKUP([.G111];[$収録番号.$A$1:$収録番号.$B$9];2;0)" office:value-type="float" office:value="15" calcext:value-type="float">
            <text:p>15</text:p>
          </table:table-cell>
          <table:table-cell office:value-type="string" calcext:value-type="string">
            <text:p>N</text:p>
          </table:table-cell>
          <table:table-cell table:formula="of:=VLOOKUP([.I111];[$レアリティ番号.$A$1:$レアリティ番号.$B$4];2;0)" office:value-type="float" office:value="1" calcext:value-type="float">
            <text:p>1</text:p>
          </table:table-cell>
          <table:table-cell office:value-type="string" calcext:value-type="string">
            <text:p>イジン</text:p>
          </table:table-cell>
          <table:table-cell table:formula="of:=VLOOKUP([.K111];[$種類番号.$A$1:$種類番号.$B$4];2;0)" office:value-type="float" office:value="1" calcext:value-type="float">
            <text:p>1</text:p>
          </table:table-cell>
          <table:table-cell office:value-type="string" calcext:value-type="string">
            <text:p>赤</text:p>
          </table:table-cell>
          <table:table-cell table:formula="of:=VLOOKUP([.M111];[$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1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11];[$特性番号.$A$1:$特性番号.$B$8];2;0);0)" office:value-type="float" office:value="0" calcext:value-type="float">
            <text:p>0</text:p>
          </table:table-cell>
          <table:table-cell office:value-type="string" calcext:value-type="string">
            <text:p>アタッカーになったとき、自分の手札のマホウ1つを見せて発動できる。このターンの間「パワー5000以上のイジンにブロックされない」を得る。</text:p>
          </table:table-cell>
          <table:table-cell table:style-name="ce8" office:value-type="string" calcext:value-type="string">
            <text:p>1ドローする</text:p>
          </table:table-cell>
          <table:table-cell table:formula="of:=IFERROR(VLOOKUP([.$V111];[$遺業能力番号.$A$1:$遺業能力番号.$B$9];2;0);0)" office:value-type="float" office:value="4" calcext:value-type="float">
            <text:p>4</text:p>
          </table:table-cell>
          <table:table-cell office:value-type="string" calcext:value-type="string">
            <text:p>https://one-draw.jp/ijinden/cardlist/001/card/01_071.png</text:p>
          </table:table-cell>
          <table:table-cell table:formula="of:=CONCATENATE([$JSON.$A$1];[.$C111];[$JSON.$B$1];[.$E111];[$JSON.$C$1];[.$F111];[$JSON.$D$1];IF(ISNA([.$S111]);&quot;null&quot;;&quot;&quot;&quot;&quot;&amp;[.$S111]&amp;&quot;&quot;&quot;&quot;);[$JSON.$E$1];[.$U111];[$JSON.$F$1];IF(ISNA([.$V111]);&quot;null&quot;;&quot;&quot;&quot;&quot;&amp;[.$V111]&amp;&quot;&quot;&quot;&quot;);[$JSON.$G$1];[.$X111];[$JSON.$H$1];[.$H111];[$JSON.$I$1];[.J111];[$JSON.$J$1];[.$L111];[$JSON.$K$1];[.$O111];[$JSON.$L$1];[.$N111];[$JSON.$M$1];[.$R111];[$JSON.$N$1];[.$T111];[$JSON.$O$1];[.$W111];[$JSON.$P$1];[.$A111];[$JSON.$Q$1];[.$B111];[$JSON.$R$1])" office:value-type="string" office:string-value="{&quot;id&quot;:&quot;1-71&quot;,&quot;name&quot;:&quot;ミュンツァー&quot;,&quot;kana&quot;:&quot;みゅんつぁー&quot;,&quot;traitText&quot;:null,&quot;ruleText&quot;:&quot;アタッカーになったとき、自分の手札のマホウ1つを見せて発動できる。このターンの間「パワー5000以上のイジンにブロックされない」を得る。&quot;,&quot;legacyText&quot;:&quot;1ドローする&quot;,&quot;imageUrl&quot;:&quot;https://one-draw.jp/ijinden/cardlist/001/card/01_071.png&quot;,&quot;expansion&quot;:15,&quot;rarity&quot;:1,&quot;type&quot;:1,&quot;level&quot;:1,&quot;color&quot;:1,&quot;term&quot;:0,&quot;trait&quot;:0,&quot;legacy&quot;:4,&quot;orderTable&quot;:110,&quot;orderDeck&quot;:3}," calcext:value-type="string">
            <text:p>{"id":"1-71","name":"ミュンツァー","kana":"みゅんつぁー","traitText":null,"ruleText":"アタッカーになったとき、自分の手札のマホウ1つを見せて発動できる。このターンの間「パワー5000以上のイジンにブロックされない」を得る。","legacyText":"1ドローする","imageUrl":"https://one-draw.jp/ijinden/cardlist/001/card/01_071.png","expansion":15,"rarity":1,"type":1,"level":1,"color":1,"term":0,"trait":0,"legacy":4,"orderTable":110,"orderDeck":3},</text:p>
          </table:table-cell>
          <table:table-cell table:number-columns-repeated="16347"/>
        </table:table-row>
        <table:table-row table:style-name="ro2">
          <table:table-cell office:value-type="float" office:value="111" calcext:value-type="float">
            <text:p>111</text:p>
          </table:table-cell>
          <table:table-cell office:value-type="float" office:value="27" calcext:value-type="float">
            <text:p>27</text:p>
          </table:table-cell>
          <table:table-cell office:value-type="string" calcext:value-type="string">
            <text:p>1-72</text:p>
          </table:table-cell>
          <table:table-cell office:value-type="float" office:value="72" calcext:value-type="float">
            <text:p>72</text:p>
          </table:table-cell>
          <table:table-cell office:value-type="string" calcext:value-type="string">
            <text:p>大江広元</text:p>
          </table:table-cell>
          <table:table-cell office:value-type="string" calcext:value-type="string">
            <text:p>おおえのひろもと</text:p>
          </table:table-cell>
          <table:table-cell office:value-type="string" calcext:value-type="string">
            <text:p>第１弾ブースターパック</text:p>
          </table:table-cell>
          <table:table-cell table:formula="of:=VLOOKUP([.G112];[$収録番号.$A$1:$収録番号.$B$9];2;0)" office:value-type="float" office:value="15" calcext:value-type="float">
            <text:p>15</text:p>
          </table:table-cell>
          <table:table-cell office:value-type="string" calcext:value-type="string">
            <text:p>N</text:p>
          </table:table-cell>
          <table:table-cell table:formula="of:=VLOOKUP([.I112];[$レアリティ番号.$A$1:$レアリティ番号.$B$4];2;0)" office:value-type="float" office:value="1" calcext:value-type="float">
            <text:p>1</text:p>
          </table:table-cell>
          <table:table-cell office:value-type="string" calcext:value-type="string">
            <text:p>イジン</text:p>
          </table:table-cell>
          <table:table-cell table:formula="of:=VLOOKUP([.K112];[$種類番号.$A$1:$種類番号.$B$4];2;0)" office:value-type="float" office:value="1" calcext:value-type="float">
            <text:p>1</text:p>
          </table:table-cell>
          <table:table-cell office:value-type="string" calcext:value-type="string">
            <text:p>赤</text:p>
          </table:table-cell>
          <table:table-cell table:formula="of:=VLOOKUP([.M112];[$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1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12];[$特性番号.$A$1:$特性番号.$B$8];2;0);0)" office:value-type="float" office:value="0" calcext:value-type="float">
            <text:p>0</text:p>
          </table:table-cell>
          <table:table-cell office:value-type="string" calcext:value-type="string">
            <text:p>相手の戦場のイジンが破壊されるたび、1ドローする。</text:p>
          </table:table-cell>
          <table:table-cell table:style-name="ce8" office:value-type="string" calcext:value-type="string">
            <text:p>1ドローする</text:p>
          </table:table-cell>
          <table:table-cell table:formula="of:=IFERROR(VLOOKUP([.$V112];[$遺業能力番号.$A$1:$遺業能力番号.$B$9];2;0);0)" office:value-type="float" office:value="4" calcext:value-type="float">
            <text:p>4</text:p>
          </table:table-cell>
          <table:table-cell office:value-type="string" calcext:value-type="string">
            <text:p>https://one-draw.jp/ijinden/cardlist/001/card/01_072.png</text:p>
          </table:table-cell>
          <table:table-cell table:formula="of:=CONCATENATE([$JSON.$A$1];[.$C112];[$JSON.$B$1];[.$E112];[$JSON.$C$1];[.$F112];[$JSON.$D$1];IF(ISNA([.$S112]);&quot;null&quot;;&quot;&quot;&quot;&quot;&amp;[.$S112]&amp;&quot;&quot;&quot;&quot;);[$JSON.$E$1];[.$U112];[$JSON.$F$1];IF(ISNA([.$V112]);&quot;null&quot;;&quot;&quot;&quot;&quot;&amp;[.$V112]&amp;&quot;&quot;&quot;&quot;);[$JSON.$G$1];[.$X112];[$JSON.$H$1];[.$H112];[$JSON.$I$1];[.J112];[$JSON.$J$1];[.$L112];[$JSON.$K$1];[.$O112];[$JSON.$L$1];[.$N112];[$JSON.$M$1];[.$R112];[$JSON.$N$1];[.$T112];[$JSON.$O$1];[.$W112];[$JSON.$P$1];[.$A112];[$JSON.$Q$1];[.$B112];[$JSON.$R$1])" office:value-type="string" office:string-value="{&quot;id&quot;:&quot;1-72&quot;,&quot;name&quot;:&quot;大江広元&quot;,&quot;kana&quot;:&quot;おおえのひろもと&quot;,&quot;traitText&quot;:null,&quot;ruleText&quot;:&quot;相手の戦場のイジンが破壊されるたび、1ドローする。&quot;,&quot;legacyText&quot;:&quot;1ドローする&quot;,&quot;imageUrl&quot;:&quot;https://one-draw.jp/ijinden/cardlist/001/card/01_072.png&quot;,&quot;expansion&quot;:15,&quot;rarity&quot;:1,&quot;type&quot;:1,&quot;level&quot;:2,&quot;color&quot;:1,&quot;term&quot;:0,&quot;trait&quot;:0,&quot;legacy&quot;:4,&quot;orderTable&quot;:111,&quot;orderDeck&quot;:27}," calcext:value-type="string">
            <text:p>{"id":"1-72","name":"大江広元","kana":"おおえのひろもと","traitText":null,"ruleText":"相手の戦場のイジンが破壊されるたび、1ドローする。","legacyText":"1ドローする","imageUrl":"https://one-draw.jp/ijinden/cardlist/001/card/01_072.png","expansion":15,"rarity":1,"type":1,"level":2,"color":1,"term":0,"trait":0,"legacy":4,"orderTable":111,"orderDeck":27},</text:p>
          </table:table-cell>
          <table:table-cell table:number-columns-repeated="16347"/>
        </table:table-row>
        <table:table-row table:style-name="ro2">
          <table:table-cell office:value-type="float" office:value="112" calcext:value-type="float">
            <text:p>112</text:p>
          </table:table-cell>
          <table:table-cell office:value-type="float" office:value="117" calcext:value-type="float">
            <text:p>117</text:p>
          </table:table-cell>
          <table:table-cell office:value-type="string" calcext:value-type="string">
            <text:p>1-73</text:p>
          </table:table-cell>
          <table:table-cell office:value-type="float" office:value="73" calcext:value-type="float">
            <text:p>73</text:p>
          </table:table-cell>
          <table:table-cell office:value-type="string" calcext:value-type="string">
            <text:p>グスタフ2世アドルフ</text:p>
          </table:table-cell>
          <table:table-cell office:value-type="string" calcext:value-type="string">
            <text:p>ぐすたふにせいあどるふ</text:p>
          </table:table-cell>
          <table:table-cell office:value-type="string" calcext:value-type="string">
            <text:p>第１弾ブースターパック</text:p>
          </table:table-cell>
          <table:table-cell table:formula="of:=VLOOKUP([.G113];[$収録番号.$A$1:$収録番号.$B$9];2;0)" office:value-type="float" office:value="15" calcext:value-type="float">
            <text:p>15</text:p>
          </table:table-cell>
          <table:table-cell office:value-type="string" calcext:value-type="string">
            <text:p>N</text:p>
          </table:table-cell>
          <table:table-cell table:formula="of:=VLOOKUP([.I113];[$レアリティ番号.$A$1:$レアリティ番号.$B$4];2;0)" office:value-type="float" office:value="1" calcext:value-type="float">
            <text:p>1</text:p>
          </table:table-cell>
          <table:table-cell office:value-type="string" calcext:value-type="string">
            <text:p>イジン</text:p>
          </table:table-cell>
          <table:table-cell table:formula="of:=VLOOKUP([.K113];[$種類番号.$A$1:$種類番号.$B$4];2;0)" office:value-type="float" office:value="1" calcext:value-type="float">
            <text:p>1</text:p>
          </table:table-cell>
          <table:table-cell office:value-type="string" calcext:value-type="string">
            <text:p>青</text:p>
          </table:table-cell>
          <table:table-cell table:formula="of:=VLOOKUP([.M113];[$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1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13];[$特性番号.$A$1:$特性番号.$B$8];2;0);0)" office:value-type="float" office:value="0" calcext:value-type="float">
            <text:p>0</text:p>
          </table:table-cell>
          <table:table-cell office:value-type="string" calcext:value-type="string">
            <text:p>イジンが相手の戦場に置かれる際、そのイジンは寝ている状態で戦場に置かれる。¶ブロック+2000</text:p>
          </table:table-cell>
          <table:table-cell table:style-name="ce8" office:value-type="string" calcext:value-type="string">
            <text:p>1ドローする</text:p>
          </table:table-cell>
          <table:table-cell table:formula="of:=IFERROR(VLOOKUP([.$V113];[$遺業能力番号.$A$1:$遺業能力番号.$B$9];2;0);0)" office:value-type="float" office:value="4" calcext:value-type="float">
            <text:p>4</text:p>
          </table:table-cell>
          <table:table-cell office:value-type="string" calcext:value-type="string">
            <text:p>https://one-draw.jp/ijinden/cardlist/001/card/01_073.png</text:p>
          </table:table-cell>
          <table:table-cell table:formula="of:=CONCATENATE([$JSON.$A$1];[.$C113];[$JSON.$B$1];[.$E113];[$JSON.$C$1];[.$F113];[$JSON.$D$1];IF(ISNA([.$S113]);&quot;null&quot;;&quot;&quot;&quot;&quot;&amp;[.$S113]&amp;&quot;&quot;&quot;&quot;);[$JSON.$E$1];[.$U113];[$JSON.$F$1];IF(ISNA([.$V113]);&quot;null&quot;;&quot;&quot;&quot;&quot;&amp;[.$V113]&amp;&quot;&quot;&quot;&quot;);[$JSON.$G$1];[.$X113];[$JSON.$H$1];[.$H113];[$JSON.$I$1];[.J113];[$JSON.$J$1];[.$L113];[$JSON.$K$1];[.$O113];[$JSON.$L$1];[.$N113];[$JSON.$M$1];[.$R113];[$JSON.$N$1];[.$T113];[$JSON.$O$1];[.$W113];[$JSON.$P$1];[.$A113];[$JSON.$Q$1];[.$B113];[$JSON.$R$1])" office:value-type="string" office:string-value="{&quot;id&quot;:&quot;1-73&quot;,&quot;name&quot;:&quot;グスタフ2世アドルフ&quot;,&quot;kana&quot;:&quot;ぐすたふにせいあどるふ&quot;,&quot;traitText&quot;:null,&quot;ruleText&quot;:&quot;イジンが相手の戦場に置かれる際、そのイジンは寝ている状態で戦場に置かれる。¶ブロック+2000&quot;,&quot;legacyText&quot;:&quot;1ドローする&quot;,&quot;imageUrl&quot;:&quot;https://one-draw.jp/ijinden/cardlist/001/card/01_073.png&quot;,&quot;expansion&quot;:15,&quot;rarity&quot;:1,&quot;type&quot;:1,&quot;level&quot;:4,&quot;color&quot;:2,&quot;term&quot;:0,&quot;trait&quot;:0,&quot;legacy&quot;:4,&quot;orderTable&quot;:112,&quot;orderDeck&quot;:117}," calcext:value-type="string">
            <text:p>{"id":"1-73","name":"グスタフ2世アドルフ","kana":"ぐすたふにせいあどるふ","traitText":null,"ruleText":"イジンが相手の戦場に置かれる際、そのイジンは寝ている状態で戦場に置かれる。¶ブロック+2000","legacyText":"1ドローする","imageUrl":"https://one-draw.jp/ijinden/cardlist/001/card/01_073.png","expansion":15,"rarity":1,"type":1,"level":4,"color":2,"term":0,"trait":0,"legacy":4,"orderTable":112,"orderDeck":117},</text:p>
          </table:table-cell>
          <table:table-cell table:number-columns-repeated="16347"/>
        </table:table-row>
        <table:table-row table:style-name="ro2">
          <table:table-cell office:value-type="float" office:value="113" calcext:value-type="float">
            <text:p>113</text:p>
          </table:table-cell>
          <table:table-cell office:value-type="float" office:value="118" calcext:value-type="float">
            <text:p>118</text:p>
          </table:table-cell>
          <table:table-cell office:value-type="string" calcext:value-type="string">
            <text:p>1-74</text:p>
          </table:table-cell>
          <table:table-cell office:value-type="float" office:value="74" calcext:value-type="float">
            <text:p>74</text:p>
          </table:table-cell>
          <table:table-cell office:value-type="string" calcext:value-type="string">
            <text:p>オリバー・クロムウェル</text:p>
          </table:table-cell>
          <table:table-cell office:value-type="string" calcext:value-type="string">
            <text:p>おりばーくろむうぇる</text:p>
          </table:table-cell>
          <table:table-cell office:value-type="string" calcext:value-type="string">
            <text:p>第１弾ブースターパック</text:p>
          </table:table-cell>
          <table:table-cell table:formula="of:=VLOOKUP([.G114];[$収録番号.$A$1:$収録番号.$B$9];2;0)" office:value-type="float" office:value="15" calcext:value-type="float">
            <text:p>15</text:p>
          </table:table-cell>
          <table:table-cell office:value-type="string" calcext:value-type="string">
            <text:p>N</text:p>
          </table:table-cell>
          <table:table-cell table:formula="of:=VLOOKUP([.I114];[$レアリティ番号.$A$1:$レアリティ番号.$B$4];2;0)" office:value-type="float" office:value="1" calcext:value-type="float">
            <text:p>1</text:p>
          </table:table-cell>
          <table:table-cell office:value-type="string" calcext:value-type="string">
            <text:p>イジン</text:p>
          </table:table-cell>
          <table:table-cell table:formula="of:=VLOOKUP([.K114];[$種類番号.$A$1:$種類番号.$B$4];2;0)" office:value-type="float" office:value="1" calcext:value-type="float">
            <text:p>1</text:p>
          </table:table-cell>
          <table:table-cell office:value-type="string" calcext:value-type="string">
            <text:p>青</text:p>
          </table:table-cell>
          <table:table-cell table:formula="of:=VLOOKUP([.M114];[$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1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14];[$特性番号.$A$1:$特性番号.$B$8];2;0);0)" office:value-type="float" office:value="0" calcext:value-type="float">
            <text:p>0</text:p>
          </table:table-cell>
          <table:table-cell office:value-type="string" calcext:value-type="string">
            <text:p>相手の魔力ゾーンの裏のカード1つにつき「アタック+1000」を得る。</text:p>
          </table:table-cell>
          <table:table-cell table:style-name="ce8" table:formula="of:=NA()" office:value-type="string" office:string-value="" calcext:value-type="error">
            <text:p>#N/A</text:p>
          </table:table-cell>
          <table:table-cell table:formula="of:=IFERROR(VLOOKUP([.$V114];[$遺業能力番号.$A$1:$遺業能力番号.$B$9];2;0);0)" office:value-type="float" office:value="0" calcext:value-type="float">
            <text:p>0</text:p>
          </table:table-cell>
          <table:table-cell office:value-type="string" calcext:value-type="string">
            <text:p>https://one-draw.jp/ijinden/cardlist/001/card/01_074.png</text:p>
          </table:table-cell>
          <table:table-cell table:formula="of:=CONCATENATE([$JSON.$A$1];[.$C114];[$JSON.$B$1];[.$E114];[$JSON.$C$1];[.$F114];[$JSON.$D$1];IF(ISNA([.$S114]);&quot;null&quot;;&quot;&quot;&quot;&quot;&amp;[.$S114]&amp;&quot;&quot;&quot;&quot;);[$JSON.$E$1];[.$U114];[$JSON.$F$1];IF(ISNA([.$V114]);&quot;null&quot;;&quot;&quot;&quot;&quot;&amp;[.$V114]&amp;&quot;&quot;&quot;&quot;);[$JSON.$G$1];[.$X114];[$JSON.$H$1];[.$H114];[$JSON.$I$1];[.J114];[$JSON.$J$1];[.$L114];[$JSON.$K$1];[.$O114];[$JSON.$L$1];[.$N114];[$JSON.$M$1];[.$R114];[$JSON.$N$1];[.$T114];[$JSON.$O$1];[.$W114];[$JSON.$P$1];[.$A114];[$JSON.$Q$1];[.$B114];[$JSON.$R$1])" office:value-type="string" office:string-value="{&quot;id&quot;:&quot;1-74&quot;,&quot;name&quot;:&quot;オリバー・クロムウェル&quot;,&quot;kana&quot;:&quot;おりばーくろむうぇる&quot;,&quot;traitText&quot;:null,&quot;ruleText&quot;:&quot;相手の魔力ゾーンの裏のカード1つにつき「アタック+1000」を得る。&quot;,&quot;legacyText&quot;:null,&quot;imageUrl&quot;:&quot;https://one-draw.jp/ijinden/cardlist/001/card/01_074.png&quot;,&quot;expansion&quot;:15,&quot;rarity&quot;:1,&quot;type&quot;:1,&quot;level&quot;:4,&quot;color&quot;:2,&quot;term&quot;:0,&quot;trait&quot;:0,&quot;legacy&quot;:0,&quot;orderTable&quot;:113,&quot;orderDeck&quot;:118}," calcext:value-type="string">
            <text:p>{"id":"1-74","name":"オリバー・クロムウェル","kana":"おりばーくろむうぇる","traitText":null,"ruleText":"相手の魔力ゾーンの裏のカード1つにつき「アタック+1000」を得る。","legacyText":null,"imageUrl":"https://one-draw.jp/ijinden/cardlist/001/card/01_074.png","expansion":15,"rarity":1,"type":1,"level":4,"color":2,"term":0,"trait":0,"legacy":0,"orderTable":113,"orderDeck":118},</text:p>
          </table:table-cell>
          <table:table-cell table:number-columns-repeated="16347"/>
        </table:table-row>
        <table:table-row table:style-name="ro2">
          <table:table-cell office:value-type="float" office:value="114" calcext:value-type="float">
            <text:p>114</text:p>
          </table:table-cell>
          <table:table-cell office:value-type="float" office:value="119" calcext:value-type="float">
            <text:p>119</text:p>
          </table:table-cell>
          <table:table-cell office:value-type="string" calcext:value-type="string">
            <text:p>1-75</text:p>
          </table:table-cell>
          <table:table-cell office:value-type="float" office:value="75" calcext:value-type="float">
            <text:p>75</text:p>
          </table:table-cell>
          <table:table-cell office:value-type="string" calcext:value-type="string">
            <text:p>衛青</text:p>
          </table:table-cell>
          <table:table-cell office:value-type="string" calcext:value-type="string">
            <text:p>えいせい</text:p>
          </table:table-cell>
          <table:table-cell office:value-type="string" calcext:value-type="string">
            <text:p>第１弾ブースターパック</text:p>
          </table:table-cell>
          <table:table-cell table:formula="of:=VLOOKUP([.G115];[$収録番号.$A$1:$収録番号.$B$9];2;0)" office:value-type="float" office:value="15" calcext:value-type="float">
            <text:p>15</text:p>
          </table:table-cell>
          <table:table-cell office:value-type="string" calcext:value-type="string">
            <text:p>N</text:p>
          </table:table-cell>
          <table:table-cell table:formula="of:=VLOOKUP([.I115];[$レアリティ番号.$A$1:$レアリティ番号.$B$4];2;0)" office:value-type="float" office:value="1" calcext:value-type="float">
            <text:p>1</text:p>
          </table:table-cell>
          <table:table-cell office:value-type="string" calcext:value-type="string">
            <text:p>イジン</text:p>
          </table:table-cell>
          <table:table-cell table:formula="of:=VLOOKUP([.K115];[$種類番号.$A$1:$種類番号.$B$4];2;0)" office:value-type="float" office:value="1" calcext:value-type="float">
            <text:p>1</text:p>
          </table:table-cell>
          <table:table-cell office:value-type="string" calcext:value-type="string">
            <text:p>青</text:p>
          </table:table-cell>
          <table:table-cell table:formula="of:=VLOOKUP([.M115];[$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1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15];[$特性番号.$A$1:$特性番号.$B$8];2;0);0)" office:value-type="float" office:value="0" calcext:value-type="float">
            <text:p>0</text:p>
          </table:table-cell>
          <table:table-cell office:value-type="string" calcext:value-type="string">
            <text:p>戦場に置かれたとき、自分の戦場のイジンが2体以下なら発動する。1ドローして、イジン召喚権+1する。</text:p>
          </table:table-cell>
          <table:table-cell table:style-name="ce8" office:value-type="string" calcext:value-type="string">
            <text:p>1ドローする</text:p>
          </table:table-cell>
          <table:table-cell table:formula="of:=IFERROR(VLOOKUP([.$V115];[$遺業能力番号.$A$1:$遺業能力番号.$B$9];2;0);0)" office:value-type="float" office:value="4" calcext:value-type="float">
            <text:p>4</text:p>
          </table:table-cell>
          <table:table-cell office:value-type="string" calcext:value-type="string">
            <text:p>https://one-draw.jp/ijinden/cardlist/001/card/01_075.png</text:p>
          </table:table-cell>
          <table:table-cell table:formula="of:=CONCATENATE([$JSON.$A$1];[.$C115];[$JSON.$B$1];[.$E115];[$JSON.$C$1];[.$F115];[$JSON.$D$1];IF(ISNA([.$S115]);&quot;null&quot;;&quot;&quot;&quot;&quot;&amp;[.$S115]&amp;&quot;&quot;&quot;&quot;);[$JSON.$E$1];[.$U115];[$JSON.$F$1];IF(ISNA([.$V115]);&quot;null&quot;;&quot;&quot;&quot;&quot;&amp;[.$V115]&amp;&quot;&quot;&quot;&quot;);[$JSON.$G$1];[.$X115];[$JSON.$H$1];[.$H115];[$JSON.$I$1];[.J115];[$JSON.$J$1];[.$L115];[$JSON.$K$1];[.$O115];[$JSON.$L$1];[.$N115];[$JSON.$M$1];[.$R115];[$JSON.$N$1];[.$T115];[$JSON.$O$1];[.$W115];[$JSON.$P$1];[.$A115];[$JSON.$Q$1];[.$B115];[$JSON.$R$1])" office:value-type="string" office:string-value="{&quot;id&quot;:&quot;1-75&quot;,&quot;name&quot;:&quot;衛青&quot;,&quot;kana&quot;:&quot;えいせい&quot;,&quot;traitText&quot;:null,&quot;ruleText&quot;:&quot;戦場に置かれたとき、自分の戦場のイジンが2体以下なら発動する。1ドローして、イジン召喚権+1する。&quot;,&quot;legacyText&quot;:&quot;1ドローする&quot;,&quot;imageUrl&quot;:&quot;https://one-draw.jp/ijinden/cardlist/001/card/01_075.png&quot;,&quot;expansion&quot;:15,&quot;rarity&quot;:1,&quot;type&quot;:1,&quot;level&quot;:4,&quot;color&quot;:2,&quot;term&quot;:0,&quot;trait&quot;:0,&quot;legacy&quot;:4,&quot;orderTable&quot;:114,&quot;orderDeck&quot;:119}," calcext:value-type="string">
            <text:p>{"id":"1-75","name":"衛青","kana":"えいせい","traitText":null,"ruleText":"戦場に置かれたとき、自分の戦場のイジンが2体以下なら発動する。1ドローして、イジン召喚権+1する。","legacyText":"1ドローする","imageUrl":"https://one-draw.jp/ijinden/cardlist/001/card/01_075.png","expansion":15,"rarity":1,"type":1,"level":4,"color":2,"term":0,"trait":0,"legacy":4,"orderTable":114,"orderDeck":119},</text:p>
          </table:table-cell>
          <table:table-cell table:number-columns-repeated="16347"/>
        </table:table-row>
        <table:table-row table:style-name="ro2">
          <table:table-cell office:value-type="float" office:value="115" calcext:value-type="float">
            <text:p>115</text:p>
          </table:table-cell>
          <table:table-cell office:value-type="float" office:value="166" calcext:value-type="float">
            <text:p>166</text:p>
          </table:table-cell>
          <table:table-cell office:value-type="string" calcext:value-type="string">
            <text:p>1-76</text:p>
          </table:table-cell>
          <table:table-cell office:value-type="float" office:value="76" calcext:value-type="float">
            <text:p>76</text:p>
          </table:table-cell>
          <table:table-cell office:value-type="string" calcext:value-type="string">
            <text:p>シーボルト</text:p>
          </table:table-cell>
          <table:table-cell office:value-type="string" calcext:value-type="string">
            <text:p>しーぼると</text:p>
          </table:table-cell>
          <table:table-cell office:value-type="string" calcext:value-type="string">
            <text:p>第１弾ブースターパック</text:p>
          </table:table-cell>
          <table:table-cell table:formula="of:=VLOOKUP([.G116];[$収録番号.$A$1:$収録番号.$B$9];2;0)" office:value-type="float" office:value="15" calcext:value-type="float">
            <text:p>15</text:p>
          </table:table-cell>
          <table:table-cell office:value-type="string" calcext:value-type="string">
            <text:p>N</text:p>
          </table:table-cell>
          <table:table-cell table:formula="of:=VLOOKUP([.I116];[$レアリティ番号.$A$1:$レアリティ番号.$B$4];2;0)" office:value-type="float" office:value="1" calcext:value-type="float">
            <text:p>1</text:p>
          </table:table-cell>
          <table:table-cell office:value-type="string" calcext:value-type="string">
            <text:p>イジン</text:p>
          </table:table-cell>
          <table:table-cell table:formula="of:=VLOOKUP([.K116];[$種類番号.$A$1:$種類番号.$B$4];2;0)" office:value-type="float" office:value="1" calcext:value-type="float">
            <text:p>1</text:p>
          </table:table-cell>
          <table:table-cell office:value-type="string" calcext:value-type="string">
            <text:p>緑</text:p>
          </table:table-cell>
          <table:table-cell table:formula="of:=VLOOKUP([.M116];[$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1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16];[$特性番号.$A$1:$特性番号.$B$8];2;0);0)" office:value-type="float" office:value="0" calcext:value-type="float">
            <text:p>0</text:p>
          </table:table-cell>
          <table:table-cell office:value-type="string" calcext:value-type="string">
            <text:p>自分の墓地の「美術」カード1つにつき「パワー+1000」を得る。¶パワー7000以上の間「アタッカーになったとき、これを起こす」を得る。</text:p>
          </table:table-cell>
          <table:table-cell table:style-name="ce8" table:formula="of:=NA()" office:value-type="string" office:string-value="" calcext:value-type="error">
            <text:p>#N/A</text:p>
          </table:table-cell>
          <table:table-cell table:formula="of:=IFERROR(VLOOKUP([.$V116];[$遺業能力番号.$A$1:$遺業能力番号.$B$9];2;0);0)" office:value-type="float" office:value="0" calcext:value-type="float">
            <text:p>0</text:p>
          </table:table-cell>
          <table:table-cell office:value-type="string" calcext:value-type="string">
            <text:p>https://one-draw.jp/ijinden/cardlist/001/card/01_076.png</text:p>
          </table:table-cell>
          <table:table-cell table:formula="of:=CONCATENATE([$JSON.$A$1];[.$C116];[$JSON.$B$1];[.$E116];[$JSON.$C$1];[.$F116];[$JSON.$D$1];IF(ISNA([.$S116]);&quot;null&quot;;&quot;&quot;&quot;&quot;&amp;[.$S116]&amp;&quot;&quot;&quot;&quot;);[$JSON.$E$1];[.$U116];[$JSON.$F$1];IF(ISNA([.$V116]);&quot;null&quot;;&quot;&quot;&quot;&quot;&amp;[.$V116]&amp;&quot;&quot;&quot;&quot;);[$JSON.$G$1];[.$X116];[$JSON.$H$1];[.$H116];[$JSON.$I$1];[.J116];[$JSON.$J$1];[.$L116];[$JSON.$K$1];[.$O116];[$JSON.$L$1];[.$N116];[$JSON.$M$1];[.$R116];[$JSON.$N$1];[.$T116];[$JSON.$O$1];[.$W116];[$JSON.$P$1];[.$A116];[$JSON.$Q$1];[.$B116];[$JSON.$R$1])" office:value-type="string" office:string-value="{&quot;id&quot;:&quot;1-76&quot;,&quot;name&quot;:&quot;シーボルト&quot;,&quot;kana&quot;:&quot;しーぼると&quot;,&quot;traitText&quot;:null,&quot;ruleText&quot;:&quot;自分の墓地の「美術」カード1つにつき「パワー+1000」を得る。¶パワー7000以上の間「アタッカーになったとき、これを起こす」を得る。&quot;,&quot;legacyText&quot;:null,&quot;imageUrl&quot;:&quot;https://one-draw.jp/ijinden/cardlist/001/card/01_076.png&quot;,&quot;expansion&quot;:15,&quot;rarity&quot;:1,&quot;type&quot;:1,&quot;level&quot;:5,&quot;color&quot;:4,&quot;term&quot;:0,&quot;trait&quot;:0,&quot;legacy&quot;:0,&quot;orderTable&quot;:115,&quot;orderDeck&quot;:166}," calcext:value-type="string">
            <text:p>{"id":"1-76","name":"シーボルト","kana":"しーぼると","traitText":null,"ruleText":"自分の墓地の「美術」カード1つにつき「パワー+1000」を得る。¶パワー7000以上の間「アタッカーになったとき、これを起こす」を得る。","legacyText":null,"imageUrl":"https://one-draw.jp/ijinden/cardlist/001/card/01_076.png","expansion":15,"rarity":1,"type":1,"level":5,"color":4,"term":0,"trait":0,"legacy":0,"orderTable":115,"orderDeck":166},</text:p>
          </table:table-cell>
          <table:table-cell table:number-columns-repeated="16347"/>
        </table:table-row>
        <table:table-row table:style-name="ro2">
          <table:table-cell office:value-type="float" office:value="116" calcext:value-type="float">
            <text:p>116</text:p>
          </table:table-cell>
          <table:table-cell office:value-type="float" office:value="46" calcext:value-type="float">
            <text:p>46</text:p>
          </table:table-cell>
          <table:table-cell office:value-type="string" calcext:value-type="string">
            <text:p>1-77</text:p>
          </table:table-cell>
          <table:table-cell office:value-type="float" office:value="77" calcext:value-type="float">
            <text:p>77</text:p>
          </table:table-cell>
          <table:table-cell office:value-type="string" calcext:value-type="string">
            <text:p>乾隆帝</text:p>
          </table:table-cell>
          <table:table-cell office:value-type="string" calcext:value-type="string">
            <text:p>けんりゅうてい</text:p>
          </table:table-cell>
          <table:table-cell office:value-type="string" calcext:value-type="string">
            <text:p>第１弾ブースターパック</text:p>
          </table:table-cell>
          <table:table-cell table:formula="of:=VLOOKUP([.G117];[$収録番号.$A$1:$収録番号.$B$9];2;0)" office:value-type="float" office:value="15" calcext:value-type="float">
            <text:p>15</text:p>
          </table:table-cell>
          <table:table-cell office:value-type="string" calcext:value-type="string">
            <text:p>N</text:p>
          </table:table-cell>
          <table:table-cell table:formula="of:=VLOOKUP([.I117];[$レアリティ番号.$A$1:$レアリティ番号.$B$4];2;0)" office:value-type="float" office:value="1" calcext:value-type="float">
            <text:p>1</text:p>
          </table:table-cell>
          <table:table-cell office:value-type="string" calcext:value-type="string">
            <text:p>イジン</text:p>
          </table:table-cell>
          <table:table-cell table:formula="of:=VLOOKUP([.K117];[$種類番号.$A$1:$種類番号.$B$4];2;0)" office:value-type="float" office:value="1" calcext:value-type="float">
            <text:p>1</text:p>
          </table:table-cell>
          <table:table-cell office:value-type="string" calcext:value-type="string">
            <text:p>緑</text:p>
          </table:table-cell>
          <table:table-cell table:formula="of:=VLOOKUP([.M117];[$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1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17];[$特性番号.$A$1:$特性番号.$B$8];2;0);0)" office:value-type="float" office:value="0" calcext:value-type="float">
            <text:p>0</text:p>
          </table:table-cell>
          <table:table-cell/>
          <table:table-cell table:style-name="ce8" table:formula="of:=NA()" office:value-type="string" office:string-value="" calcext:value-type="error">
            <text:p>#N/A</text:p>
          </table:table-cell>
          <table:table-cell table:formula="of:=IFERROR(VLOOKUP([.$V117];[$遺業能力番号.$A$1:$遺業能力番号.$B$9];2;0);0)" office:value-type="float" office:value="0" calcext:value-type="float">
            <text:p>0</text:p>
          </table:table-cell>
          <table:table-cell office:value-type="string" calcext:value-type="string">
            <text:p>https://one-draw.jp/ijinden/cardlist/001/card/01_077.png</text:p>
          </table:table-cell>
          <table:table-cell table:formula="of:=CONCATENATE([$JSON.$A$1];[.$C117];[$JSON.$B$1];[.$E117];[$JSON.$C$1];[.$F117];[$JSON.$D$1];IF(ISNA([.$S117]);&quot;null&quot;;&quot;&quot;&quot;&quot;&amp;[.$S117]&amp;&quot;&quot;&quot;&quot;);[$JSON.$E$1];[.$U117];[$JSON.$F$1];IF(ISNA([.$V117]);&quot;null&quot;;&quot;&quot;&quot;&quot;&amp;[.$V117]&amp;&quot;&quot;&quot;&quot;);[$JSON.$G$1];[.$X117];[$JSON.$H$1];[.$H117];[$JSON.$I$1];[.J117];[$JSON.$J$1];[.$L117];[$JSON.$K$1];[.$O117];[$JSON.$L$1];[.$N117];[$JSON.$M$1];[.$R117];[$JSON.$N$1];[.$T117];[$JSON.$O$1];[.$W117];[$JSON.$P$1];[.$A117];[$JSON.$Q$1];[.$B117];[$JSON.$R$1])" office:value-type="string" office:string-value="{&quot;id&quot;:&quot;1-77&quot;,&quot;name&quot;:&quot;乾隆帝&quot;,&quot;kana&quot;:&quot;けんりゅうてい&quot;,&quot;traitText&quot;:null,&quot;ruleText&quot;:&quot;&quot;,&quot;legacyText&quot;:null,&quot;imageUrl&quot;:&quot;https://one-draw.jp/ijinden/cardlist/001/card/01_077.png&quot;,&quot;expansion&quot;:15,&quot;rarity&quot;:1,&quot;type&quot;:1,&quot;level&quot;:2,&quot;color&quot;:4,&quot;term&quot;:0,&quot;trait&quot;:0,&quot;legacy&quot;:0,&quot;orderTable&quot;:116,&quot;orderDeck&quot;:46}," calcext:value-type="string">
            <text:p>{"id":"1-77","name":"乾隆帝","kana":"けんりゅうてい","traitText":null,"ruleText":"","legacyText":null,"imageUrl":"https://one-draw.jp/ijinden/cardlist/001/card/01_077.png","expansion":15,"rarity":1,"type":1,"level":2,"color":4,"term":0,"trait":0,"legacy":0,"orderTable":116,"orderDeck":46},</text:p>
          </table:table-cell>
          <table:table-cell table:number-columns-repeated="16347"/>
        </table:table-row>
        <table:table-row table:style-name="ro2">
          <table:table-cell office:value-type="float" office:value="117" calcext:value-type="float">
            <text:p>117</text:p>
          </table:table-cell>
          <table:table-cell office:value-type="float" office:value="88" calcext:value-type="float">
            <text:p>88</text:p>
          </table:table-cell>
          <table:table-cell office:value-type="string" calcext:value-type="string">
            <text:p>1-78</text:p>
          </table:table-cell>
          <table:table-cell office:value-type="float" office:value="78" calcext:value-type="float">
            <text:p>78</text:p>
          </table:table-cell>
          <table:table-cell office:value-type="string" calcext:value-type="string">
            <text:p>小野好古</text:p>
          </table:table-cell>
          <table:table-cell office:value-type="string" calcext:value-type="string">
            <text:p>おののよしふる</text:p>
          </table:table-cell>
          <table:table-cell office:value-type="string" calcext:value-type="string">
            <text:p>第１弾ブースターパック</text:p>
          </table:table-cell>
          <table:table-cell table:formula="of:=VLOOKUP([.G118];[$収録番号.$A$1:$収録番号.$B$9];2;0)" office:value-type="float" office:value="15" calcext:value-type="float">
            <text:p>15</text:p>
          </table:table-cell>
          <table:table-cell office:value-type="string" calcext:value-type="string">
            <text:p>N</text:p>
          </table:table-cell>
          <table:table-cell table:formula="of:=VLOOKUP([.I118];[$レアリティ番号.$A$1:$レアリティ番号.$B$4];2;0)" office:value-type="float" office:value="1" calcext:value-type="float">
            <text:p>1</text:p>
          </table:table-cell>
          <table:table-cell office:value-type="string" calcext:value-type="string">
            <text:p>イジン</text:p>
          </table:table-cell>
          <table:table-cell table:formula="of:=VLOOKUP([.K118];[$種類番号.$A$1:$種類番号.$B$4];2;0)" office:value-type="float" office:value="1" calcext:value-type="float">
            <text:p>1</text:p>
          </table:table-cell>
          <table:table-cell office:value-type="string" calcext:value-type="string">
            <text:p>緑</text:p>
          </table:table-cell>
          <table:table-cell table:formula="of:=VLOOKUP([.M118];[$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1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18];[$特性番号.$A$1:$特性番号.$B$8];2;0);0)" office:value-type="float" office:value="0" calcext:value-type="float">
            <text:p>0</text:p>
          </table:table-cell>
          <table:table-cell office:value-type="string" calcext:value-type="string">
            <text:p>戦場に置かれたとき、自分の手札のハイケイ1つを見せて発動できる。1ドローする。</text:p>
          </table:table-cell>
          <table:table-cell table:style-name="ce8" office:value-type="string" calcext:value-type="string">
            <text:p>1ドローする</text:p>
          </table:table-cell>
          <table:table-cell table:formula="of:=IFERROR(VLOOKUP([.$V118];[$遺業能力番号.$A$1:$遺業能力番号.$B$9];2;0);0)" office:value-type="float" office:value="4" calcext:value-type="float">
            <text:p>4</text:p>
          </table:table-cell>
          <table:table-cell office:value-type="string" calcext:value-type="string">
            <text:p>https://one-draw.jp/ijinden/cardlist/001/card/01_078.png</text:p>
          </table:table-cell>
          <table:table-cell table:formula="of:=CONCATENATE([$JSON.$A$1];[.$C118];[$JSON.$B$1];[.$E118];[$JSON.$C$1];[.$F118];[$JSON.$D$1];IF(ISNA([.$S118]);&quot;null&quot;;&quot;&quot;&quot;&quot;&amp;[.$S118]&amp;&quot;&quot;&quot;&quot;);[$JSON.$E$1];[.$U118];[$JSON.$F$1];IF(ISNA([.$V118]);&quot;null&quot;;&quot;&quot;&quot;&quot;&amp;[.$V118]&amp;&quot;&quot;&quot;&quot;);[$JSON.$G$1];[.$X118];[$JSON.$H$1];[.$H118];[$JSON.$I$1];[.J118];[$JSON.$J$1];[.$L118];[$JSON.$K$1];[.$O118];[$JSON.$L$1];[.$N118];[$JSON.$M$1];[.$R118];[$JSON.$N$1];[.$T118];[$JSON.$O$1];[.$W118];[$JSON.$P$1];[.$A118];[$JSON.$Q$1];[.$B118];[$JSON.$R$1])" office:value-type="string" office:string-value="{&quot;id&quot;:&quot;1-78&quot;,&quot;name&quot;:&quot;小野好古&quot;,&quot;kana&quot;:&quot;おののよしふる&quot;,&quot;traitText&quot;:null,&quot;ruleText&quot;:&quot;戦場に置かれたとき、自分の手札のハイケイ1つを見せて発動できる。1ドローする。&quot;,&quot;legacyText&quot;:&quot;1ドローする&quot;,&quot;imageUrl&quot;:&quot;https://one-draw.jp/ijinden/cardlist/001/card/01_078.png&quot;,&quot;expansion&quot;:15,&quot;rarity&quot;:1,&quot;type&quot;:1,&quot;level&quot;:3,&quot;color&quot;:4,&quot;term&quot;:0,&quot;trait&quot;:0,&quot;legacy&quot;:4,&quot;orderTable&quot;:117,&quot;orderDeck&quot;:88}," calcext:value-type="string">
            <text:p>{"id":"1-78","name":"小野好古","kana":"おののよしふる","traitText":null,"ruleText":"戦場に置かれたとき、自分の手札のハイケイ1つを見せて発動できる。1ドローする。","legacyText":"1ドローする","imageUrl":"https://one-draw.jp/ijinden/cardlist/001/card/01_078.png","expansion":15,"rarity":1,"type":1,"level":3,"color":4,"term":0,"trait":0,"legacy":4,"orderTable":117,"orderDeck":88},</text:p>
          </table:table-cell>
          <table:table-cell table:number-columns-repeated="16347"/>
        </table:table-row>
        <table:table-row table:style-name="ro2">
          <table:table-cell office:value-type="float" office:value="118" calcext:value-type="float">
            <text:p>118</text:p>
          </table:table-cell>
          <table:table-cell office:value-type="float" office:value="167" calcext:value-type="float">
            <text:p>167</text:p>
          </table:table-cell>
          <table:table-cell office:value-type="string" calcext:value-type="string">
            <text:p>1-79</text:p>
          </table:table-cell>
          <table:table-cell office:value-type="float" office:value="79" calcext:value-type="float">
            <text:p>79</text:p>
          </table:table-cell>
          <table:table-cell office:value-type="string" calcext:value-type="string">
            <text:p>アレッサンドロ・ヴァリニャーノ</text:p>
          </table:table-cell>
          <table:table-cell office:value-type="string" calcext:value-type="string">
            <text:p>あれっさんどろゔぁりにゃーの</text:p>
          </table:table-cell>
          <table:table-cell office:value-type="string" calcext:value-type="string">
            <text:p>第１弾ブースターパック</text:p>
          </table:table-cell>
          <table:table-cell table:formula="of:=VLOOKUP([.G119];[$収録番号.$A$1:$収録番号.$B$9];2;0)" office:value-type="float" office:value="15" calcext:value-type="float">
            <text:p>15</text:p>
          </table:table-cell>
          <table:table-cell office:value-type="string" calcext:value-type="string">
            <text:p>N</text:p>
          </table:table-cell>
          <table:table-cell table:formula="of:=VLOOKUP([.I119];[$レアリティ番号.$A$1:$レアリティ番号.$B$4];2;0)" office:value-type="float" office:value="1" calcext:value-type="float">
            <text:p>1</text:p>
          </table:table-cell>
          <table:table-cell office:value-type="string" calcext:value-type="string">
            <text:p>イジン</text:p>
          </table:table-cell>
          <table:table-cell table:formula="of:=VLOOKUP([.K119];[$種類番号.$A$1:$種類番号.$B$4];2;0)" office:value-type="float" office:value="1" calcext:value-type="float">
            <text:p>1</text:p>
          </table:table-cell>
          <table:table-cell office:value-type="string" calcext:value-type="string">
            <text:p>緑</text:p>
          </table:table-cell>
          <table:table-cell table:formula="of:=VLOOKUP([.M119];[$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航海</text:p>
          </table:table-cell>
          <table:table-cell table:formula="of:=IFERROR(VLOOKUP([.$Q119];[$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119];[$特性番号.$A$1:$特性番号.$B$8];2;0);0)" office:value-type="float" office:value="0" calcext:value-type="float">
            <text:p>0</text:p>
          </table:table-cell>
          <table:table-cell office:value-type="string" calcext:value-type="string">
            <text:p>航海 - アタッカーになったときに発動できる。自分の山札の上から1枚を、裏のまま魔力ゾーンに置く。¶自分の魔力ゾーンのカードが6つ以上の間「ダブルプレッシャー」を得る。</text:p>
          </table:table-cell>
          <table:table-cell table:style-name="ce8" table:formula="of:=NA()" office:value-type="string" office:string-value="" calcext:value-type="error">
            <text:p>#N/A</text:p>
          </table:table-cell>
          <table:table-cell table:formula="of:=IFERROR(VLOOKUP([.$V119];[$遺業能力番号.$A$1:$遺業能力番号.$B$9];2;0);0)" office:value-type="float" office:value="0" calcext:value-type="float">
            <text:p>0</text:p>
          </table:table-cell>
          <table:table-cell office:value-type="string" calcext:value-type="string">
            <text:p>https://one-draw.jp/ijinden/cardlist/001/card/01_079.png</text:p>
          </table:table-cell>
          <table:table-cell table:formula="of:=CONCATENATE([$JSON.$A$1];[.$C119];[$JSON.$B$1];[.$E119];[$JSON.$C$1];[.$F119];[$JSON.$D$1];IF(ISNA([.$S119]);&quot;null&quot;;&quot;&quot;&quot;&quot;&amp;[.$S119]&amp;&quot;&quot;&quot;&quot;);[$JSON.$E$1];[.$U119];[$JSON.$F$1];IF(ISNA([.$V119]);&quot;null&quot;;&quot;&quot;&quot;&quot;&amp;[.$V119]&amp;&quot;&quot;&quot;&quot;);[$JSON.$G$1];[.$X119];[$JSON.$H$1];[.$H119];[$JSON.$I$1];[.J119];[$JSON.$J$1];[.$L119];[$JSON.$K$1];[.$O119];[$JSON.$L$1];[.$N119];[$JSON.$M$1];[.$R119];[$JSON.$N$1];[.$T119];[$JSON.$O$1];[.$W119];[$JSON.$P$1];[.$A119];[$JSON.$Q$1];[.$B119];[$JSON.$R$1])" office:value-type="string" office:string-value="{&quot;id&quot;:&quot;1-79&quot;,&quot;name&quot;:&quot;アレッサンドロ・ヴァリニャーノ&quot;,&quot;kana&quot;:&quot;あれっさんどろゔぁりにゃーの&quot;,&quot;traitText&quot;:null,&quot;ruleText&quot;:&quot;航海 - アタッカーになったときに発動できる。自分の山札の上から1枚を、裏のまま魔力ゾーンに置く。¶自分の魔力ゾーンのカードが6つ以上の間「ダブルプレッシャー」を得る。&quot;,&quot;legacyText&quot;:null,&quot;imageUrl&quot;:&quot;https://one-draw.jp/ijinden/cardlist/001/card/01_079.png&quot;,&quot;expansion&quot;:15,&quot;rarity&quot;:1,&quot;type&quot;:1,&quot;level&quot;:5,&quot;color&quot;:4,&quot;term&quot;:1,&quot;trait&quot;:0,&quot;legacy&quot;:0,&quot;orderTable&quot;:118,&quot;orderDeck&quot;:167}," calcext:value-type="string">
            <text:p>{"id":"1-79","name":"アレッサンドロ・ヴァリニャーノ","kana":"あれっさんどろゔぁりにゃーの","traitText":null,"ruleText":"航海 - アタッカーになったときに発動できる。自分の山札の上から1枚を、裏のまま魔力ゾーンに置く。¶自分の魔力ゾーンのカードが6つ以上の間「ダブルプレッシャー」を得る。","legacyText":null,"imageUrl":"https://one-draw.jp/ijinden/cardlist/001/card/01_079.png","expansion":15,"rarity":1,"type":1,"level":5,"color":4,"term":1,"trait":0,"legacy":0,"orderTable":118,"orderDeck":167},</text:p>
          </table:table-cell>
          <table:table-cell table:number-columns-repeated="16347"/>
        </table:table-row>
        <table:table-row table:style-name="ro2">
          <table:table-cell office:value-type="float" office:value="119" calcext:value-type="float">
            <text:p>119</text:p>
          </table:table-cell>
          <table:table-cell office:value-type="float" office:value="193" calcext:value-type="float">
            <text:p>193</text:p>
          </table:table-cell>
          <table:table-cell office:value-type="string" calcext:value-type="string">
            <text:p>1-80</text:p>
          </table:table-cell>
          <table:table-cell office:value-type="float" office:value="80" calcext:value-type="float">
            <text:p>80</text:p>
          </table:table-cell>
          <table:table-cell office:value-type="string" calcext:value-type="string">
            <text:p>角倉了以</text:p>
          </table:table-cell>
          <table:table-cell office:value-type="string" calcext:value-type="string">
            <text:p>すみのくらりょうい</text:p>
          </table:table-cell>
          <table:table-cell office:value-type="string" calcext:value-type="string">
            <text:p>第１弾ブースターパック</text:p>
          </table:table-cell>
          <table:table-cell table:formula="of:=VLOOKUP([.G120];[$収録番号.$A$1:$収録番号.$B$9];2;0)" office:value-type="float" office:value="15" calcext:value-type="float">
            <text:p>15</text:p>
          </table:table-cell>
          <table:table-cell office:value-type="string" calcext:value-type="string">
            <text:p>N</text:p>
          </table:table-cell>
          <table:table-cell table:formula="of:=VLOOKUP([.I120];[$レアリティ番号.$A$1:$レアリティ番号.$B$4];2;0)" office:value-type="float" office:value="1" calcext:value-type="float">
            <text:p>1</text:p>
          </table:table-cell>
          <table:table-cell office:value-type="string" calcext:value-type="string">
            <text:p>イジン</text:p>
          </table:table-cell>
          <table:table-cell table:formula="of:=VLOOKUP([.K120];[$種類番号.$A$1:$種類番号.$B$4];2;0)" office:value-type="float" office:value="1" calcext:value-type="float">
            <text:p>1</text:p>
          </table:table-cell>
          <table:table-cell office:value-type="string" calcext:value-type="string">
            <text:p>緑</text:p>
          </table:table-cell>
          <table:table-cell table:formula="of:=VLOOKUP([.M120];[$色番号.$A$1:$色番号.$B$10];2;0)" office:value-type="float" office:value="4" calcext:value-type="float">
            <text:p>4</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2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20];[$特性番号.$A$1:$特性番号.$B$8];2;0);0)" office:value-type="float" office:value="0" calcext:value-type="float">
            <text:p>0</text:p>
          </table:table-cell>
          <table:table-cell office:value-type="string" calcext:value-type="string">
            <text:p>「航海」が発動したとき、相手の戦場のガーディアン1体を裏のまま魔力ゾーンに置く。</text:p>
          </table:table-cell>
          <table:table-cell table:style-name="ce8" table:formula="of:=NA()" office:value-type="string" office:string-value="" calcext:value-type="error">
            <text:p>#N/A</text:p>
          </table:table-cell>
          <table:table-cell table:formula="of:=IFERROR(VLOOKUP([.$V120];[$遺業能力番号.$A$1:$遺業能力番号.$B$9];2;0);0)" office:value-type="float" office:value="0" calcext:value-type="float">
            <text:p>0</text:p>
          </table:table-cell>
          <table:table-cell office:value-type="string" calcext:value-type="string">
            <text:p>https://one-draw.jp/ijinden/cardlist/001/card/01_080.png</text:p>
          </table:table-cell>
          <table:table-cell table:formula="of:=CONCATENATE([$JSON.$A$1];[.$C120];[$JSON.$B$1];[.$E120];[$JSON.$C$1];[.$F120];[$JSON.$D$1];IF(ISNA([.$S120]);&quot;null&quot;;&quot;&quot;&quot;&quot;&amp;[.$S120]&amp;&quot;&quot;&quot;&quot;);[$JSON.$E$1];[.$U120];[$JSON.$F$1];IF(ISNA([.$V120]);&quot;null&quot;;&quot;&quot;&quot;&quot;&amp;[.$V120]&amp;&quot;&quot;&quot;&quot;);[$JSON.$G$1];[.$X120];[$JSON.$H$1];[.$H120];[$JSON.$I$1];[.J120];[$JSON.$J$1];[.$L120];[$JSON.$K$1];[.$O120];[$JSON.$L$1];[.$N120];[$JSON.$M$1];[.$R120];[$JSON.$N$1];[.$T120];[$JSON.$O$1];[.$W120];[$JSON.$P$1];[.$A120];[$JSON.$Q$1];[.$B120];[$JSON.$R$1])" office:value-type="string" office:string-value="{&quot;id&quot;:&quot;1-80&quot;,&quot;name&quot;:&quot;角倉了以&quot;,&quot;kana&quot;:&quot;すみのくらりょうい&quot;,&quot;traitText&quot;:null,&quot;ruleText&quot;:&quot;「航海」が発動したとき、相手の戦場のガーディアン1体を裏のまま魔力ゾーンに置く。&quot;,&quot;legacyText&quot;:null,&quot;imageUrl&quot;:&quot;https://one-draw.jp/ijinden/cardlist/001/card/01_080.png&quot;,&quot;expansion&quot;:15,&quot;rarity&quot;:1,&quot;type&quot;:1,&quot;level&quot;:6,&quot;color&quot;:4,&quot;term&quot;:0,&quot;trait&quot;:0,&quot;legacy&quot;:0,&quot;orderTable&quot;:119,&quot;orderDeck&quot;:193}," calcext:value-type="string">
            <text:p>{"id":"1-80","name":"角倉了以","kana":"すみのくらりょうい","traitText":null,"ruleText":"「航海」が発動したとき、相手の戦場のガーディアン1体を裏のまま魔力ゾーンに置く。","legacyText":null,"imageUrl":"https://one-draw.jp/ijinden/cardlist/001/card/01_080.png","expansion":15,"rarity":1,"type":1,"level":6,"color":4,"term":0,"trait":0,"legacy":0,"orderTable":119,"orderDeck":193},</text:p>
          </table:table-cell>
          <table:table-cell table:number-columns-repeated="16347"/>
        </table:table-row>
        <table:table-row table:style-name="ro2">
          <table:table-cell office:value-type="float" office:value="120" calcext:value-type="float">
            <text:p>120</text:p>
          </table:table-cell>
          <table:table-cell office:value-type="float" office:value="196" calcext:value-type="float">
            <text:p>196</text:p>
          </table:table-cell>
          <table:table-cell office:value-type="string" calcext:value-type="string">
            <text:p>Y-1</text:p>
          </table:table-cell>
          <table:table-cell office:value-type="float" office:value="1" calcext:value-type="float">
            <text:p>1</text:p>
          </table:table-cell>
          <table:table-cell office:value-type="string" calcext:value-type="string">
            <text:p>諸葛亮</text:p>
          </table:table-cell>
          <table:table-cell office:value-type="string" calcext:value-type="string">
            <text:p>しょかつりょう</text:p>
          </table:table-cell>
          <table:table-cell office:value-type="string" calcext:value-type="string">
            <text:p>三国の英傑デッキ</text:p>
          </table:table-cell>
          <table:table-cell table:formula="of:=VLOOKUP([.G121];[$収録番号.$A$1:$収録番号.$B$9];2;0)" office:value-type="float" office:value="20" calcext:value-type="float">
            <text:p>20</text:p>
          </table:table-cell>
          <table:table-cell office:value-type="string" calcext:value-type="string">
            <text:p>SR</text:p>
          </table:table-cell>
          <table:table-cell table:formula="of:=VLOOKUP([.I121];[$レアリティ番号.$A$1:$レアリティ番号.$B$4];2;0)" office:value-type="float" office:value="4" calcext:value-type="float">
            <text:p>4</text:p>
          </table:table-cell>
          <table:table-cell office:value-type="string" calcext:value-type="string">
            <text:p>イジン</text:p>
          </table:table-cell>
          <table:table-cell table:formula="of:=VLOOKUP([.K121];[$種類番号.$A$1:$種類番号.$B$4];2;0)" office:value-type="float" office:value="1" calcext:value-type="float">
            <text:p>1</text:p>
          </table:table-cell>
          <table:table-cell office:value-type="string" calcext:value-type="string">
            <text:p>黄</text:p>
          </table:table-cell>
          <table:table-cell table:formula="of:=VLOOKUP([.M121];[$色番号.$A$1:$色番号.$B$10];2;0)" office:value-type="float" office:value="8" calcext:value-type="float">
            <text:p>8</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2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21];[$特性番号.$A$1:$特性番号.$B$8];2;0);0)" office:value-type="float" office:value="0" calcext:value-type="float">
            <text:p>0</text:p>
          </table:table-cell>
          <table:table-cell office:value-type="string" calcext:value-type="string">
            <text:p>戦場に置かれたときに発動できる。自分の山札の下から1枚を見る。ハイケイなら戦場に置いてもよい。¶黄のハイケイが自分の戦場に置かれるたび、1ドローする。</text:p>
          </table:table-cell>
          <table:table-cell table:style-name="ce8" office:value-type="string" calcext:value-type="string">
            <text:p>反魂</text:p>
          </table:table-cell>
          <table:table-cell table:formula="of:=IFERROR(VLOOKUP([.$V121];[$遺業能力番号.$A$1:$遺業能力番号.$B$9];2;0);0)" office:value-type="float" office:value="6" calcext:value-type="float">
            <text:p>6</text:p>
          </table:table-cell>
          <table:table-cell office:value-type="string" calcext:value-type="string">
            <text:p>https://one-draw.jp/ijinden/cardlist/Y01/card/02_Y_001.png</text:p>
          </table:table-cell>
          <table:table-cell table:formula="of:=CONCATENATE([$JSON.$A$1];[.$C121];[$JSON.$B$1];[.$E121];[$JSON.$C$1];[.$F121];[$JSON.$D$1];IF(ISNA([.$S121]);&quot;null&quot;;&quot;&quot;&quot;&quot;&amp;[.$S121]&amp;&quot;&quot;&quot;&quot;);[$JSON.$E$1];[.$U121];[$JSON.$F$1];IF(ISNA([.$V121]);&quot;null&quot;;&quot;&quot;&quot;&quot;&amp;[.$V121]&amp;&quot;&quot;&quot;&quot;);[$JSON.$G$1];[.$X121];[$JSON.$H$1];[.$H121];[$JSON.$I$1];[.J121];[$JSON.$J$1];[.$L121];[$JSON.$K$1];[.$O121];[$JSON.$L$1];[.$N121];[$JSON.$M$1];[.$R121];[$JSON.$N$1];[.$T121];[$JSON.$O$1];[.$W121];[$JSON.$P$1];[.$A121];[$JSON.$Q$1];[.$B121];[$JSON.$R$1])" office:value-type="string" office:string-value="{&quot;id&quot;:&quot;Y-1&quot;,&quot;name&quot;:&quot;諸葛亮&quot;,&quot;kana&quot;:&quot;しょかつりょう&quot;,&quot;traitText&quot;:null,&quot;ruleText&quot;:&quot;戦場に置かれたときに発動できる。自分の山札の下から1枚を見る。ハイケイなら戦場に置いてもよい。¶黄のハイケイが自分の戦場に置かれるたび、1ドローする。&quot;,&quot;legacyText&quot;:&quot;反魂&quot;,&quot;imageUrl&quot;:&quot;https://one-draw.jp/ijinden/cardlist/Y01/card/02_Y_001.png&quot;,&quot;expansion&quot;:20,&quot;rarity&quot;:4,&quot;type&quot;:1,&quot;level&quot;:6,&quot;color&quot;:8,&quot;term&quot;:0,&quot;trait&quot;:0,&quot;legacy&quot;:6,&quot;orderTable&quot;:120,&quot;orderDeck&quot;:196}," calcext:value-type="string">
            <text:p>{"id":"Y-1","name":"諸葛亮","kana":"しょかつりょう","traitText":null,"ruleText":"戦場に置かれたときに発動できる。自分の山札の下から1枚を見る。ハイケイなら戦場に置いてもよい。¶黄のハイケイが自分の戦場に置かれるたび、1ドローする。","legacyText":"反魂","imageUrl":"https://one-draw.jp/ijinden/cardlist/Y01/card/02_Y_001.png","expansion":20,"rarity":4,"type":1,"level":6,"color":8,"term":0,"trait":0,"legacy":6,"orderTable":120,"orderDeck":196},</text:p>
          </table:table-cell>
          <table:table-cell table:number-columns-repeated="16347"/>
        </table:table-row>
        <table:table-row table:style-name="ro2">
          <table:table-cell office:value-type="float" office:value="121" calcext:value-type="float">
            <text:p>121</text:p>
          </table:table-cell>
          <table:table-cell office:value-type="float" office:value="52" calcext:value-type="float">
            <text:p>52</text:p>
          </table:table-cell>
          <table:table-cell office:value-type="string" calcext:value-type="string">
            <text:p>Y-2</text:p>
          </table:table-cell>
          <table:table-cell office:value-type="float" office:value="2" calcext:value-type="float">
            <text:p>2</text:p>
          </table:table-cell>
          <table:table-cell office:value-type="string" calcext:value-type="string">
            <text:p>今川義元</text:p>
          </table:table-cell>
          <table:table-cell office:value-type="string" calcext:value-type="string">
            <text:p>いまがわよしもと</text:p>
          </table:table-cell>
          <table:table-cell office:value-type="string" calcext:value-type="string">
            <text:p>三国の英傑デッキ</text:p>
          </table:table-cell>
          <table:table-cell table:formula="of:=VLOOKUP([.G122];[$収録番号.$A$1:$収録番号.$B$9];2;0)" office:value-type="float" office:value="20" calcext:value-type="float">
            <text:p>20</text:p>
          </table:table-cell>
          <table:table-cell office:value-type="string" calcext:value-type="string">
            <text:p>N</text:p>
          </table:table-cell>
          <table:table-cell table:formula="of:=VLOOKUP([.I122];[$レアリティ番号.$A$1:$レアリティ番号.$B$4];2;0)" office:value-type="float" office:value="1" calcext:value-type="float">
            <text:p>1</text:p>
          </table:table-cell>
          <table:table-cell office:value-type="string" calcext:value-type="string">
            <text:p>イジン</text:p>
          </table:table-cell>
          <table:table-cell table:formula="of:=VLOOKUP([.K122];[$種類番号.$A$1:$種類番号.$B$4];2;0)" office:value-type="float" office:value="1" calcext:value-type="float">
            <text:p>1</text:p>
          </table:table-cell>
          <table:table-cell office:value-type="string" calcext:value-type="string">
            <text:p>黄</text:p>
          </table:table-cell>
          <table:table-cell table:formula="of:=VLOOKUP([.M122];[$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22];[$能力語番号.$A$1:$能力語番号.$B$10];2;0);0)" office:value-type="float" office:value="0" calcext:value-type="float">
            <text:p>0</text:p>
          </table:table-cell>
          <table:table-cell office:value-type="string" calcext:value-type="string">
            <text:p>剣術</text:p>
          </table:table-cell>
          <table:table-cell table:formula="of:=IFERROR(VLOOKUP([.$S122];[$特性番号.$A$1:$特性番号.$B$8];2;0);0)" office:value-type="float" office:value="1" calcext:value-type="float">
            <text:p>1</text:p>
          </table:table-cell>
          <table:table-cell office:value-type="string" calcext:value-type="string">
            <text:p>ウォッチャー¶破壊されたとき、戦場のハイケイ1つを指定して発動できる。そのハイケイを破壊する。¶アタック+500</text:p>
          </table:table-cell>
          <table:table-cell table:style-name="ce8" office:value-type="string" calcext:value-type="string">
            <text:p>1ドローする</text:p>
          </table:table-cell>
          <table:table-cell table:formula="of:=IFERROR(VLOOKUP([.$V122];[$遺業能力番号.$A$1:$遺業能力番号.$B$9];2;0);0)" office:value-type="float" office:value="4" calcext:value-type="float">
            <text:p>4</text:p>
          </table:table-cell>
          <table:table-cell office:value-type="string" calcext:value-type="string">
            <text:p>https://one-draw.jp/ijinden/cardlist/Y01/card/02_Y_002.png</text:p>
          </table:table-cell>
          <table:table-cell table:formula="of:=CONCATENATE([$JSON.$A$1];[.$C122];[$JSON.$B$1];[.$E122];[$JSON.$C$1];[.$F122];[$JSON.$D$1];IF(ISNA([.$S122]);&quot;null&quot;;&quot;&quot;&quot;&quot;&amp;[.$S122]&amp;&quot;&quot;&quot;&quot;);[$JSON.$E$1];[.$U122];[$JSON.$F$1];IF(ISNA([.$V122]);&quot;null&quot;;&quot;&quot;&quot;&quot;&amp;[.$V122]&amp;&quot;&quot;&quot;&quot;);[$JSON.$G$1];[.$X122];[$JSON.$H$1];[.$H122];[$JSON.$I$1];[.J122];[$JSON.$J$1];[.$L122];[$JSON.$K$1];[.$O122];[$JSON.$L$1];[.$N122];[$JSON.$M$1];[.$R122];[$JSON.$N$1];[.$T122];[$JSON.$O$1];[.$W122];[$JSON.$P$1];[.$A122];[$JSON.$Q$1];[.$B122];[$JSON.$R$1])" office:value-type="string" office:string-value="{&quot;id&quot;:&quot;Y-2&quot;,&quot;name&quot;:&quot;今川義元&quot;,&quot;kana&quot;:&quot;いまがわよしもと&quot;,&quot;traitText&quot;:&quot;剣術&quot;,&quot;ruleText&quot;:&quot;ウォッチャー¶破壊されたとき、戦場のハイケイ1つを指定して発動できる。そのハイケイを破壊する。¶アタック+500&quot;,&quot;legacyText&quot;:&quot;1ドローする&quot;,&quot;imageUrl&quot;:&quot;https://one-draw.jp/ijinden/cardlist/Y01/card/02_Y_002.png&quot;,&quot;expansion&quot;:20,&quot;rarity&quot;:1,&quot;type&quot;:1,&quot;level&quot;:2,&quot;color&quot;:8,&quot;term&quot;:0,&quot;trait&quot;:1,&quot;legacy&quot;:4,&quot;orderTable&quot;:121,&quot;orderDeck&quot;:52}," calcext:value-type="string">
            <text:p>{"id":"Y-2","name":"今川義元","kana":"いまがわよしもと","traitText":"剣術","ruleText":"ウォッチャー¶破壊されたとき、戦場のハイケイ1つを指定して発動できる。そのハイケイを破壊する。¶アタック+500","legacyText":"1ドローする","imageUrl":"https://one-draw.jp/ijinden/cardlist/Y01/card/02_Y_002.png","expansion":20,"rarity":1,"type":1,"level":2,"color":8,"term":0,"trait":1,"legacy":4,"orderTable":121,"orderDeck":52},</text:p>
          </table:table-cell>
          <table:table-cell table:number-columns-repeated="16347"/>
        </table:table-row>
        <table:table-row table:style-name="ro2">
          <table:table-cell office:value-type="float" office:value="122" calcext:value-type="float">
            <text:p>122</text:p>
          </table:table-cell>
          <table:table-cell office:value-type="float" office:value="132" calcext:value-type="float">
            <text:p>132</text:p>
          </table:table-cell>
          <table:table-cell office:value-type="string" calcext:value-type="string">
            <text:p>Y-3</text:p>
          </table:table-cell>
          <table:table-cell office:value-type="float" office:value="3" calcext:value-type="float">
            <text:p>3</text:p>
          </table:table-cell>
          <table:table-cell office:value-type="string" calcext:value-type="string">
            <text:p>周瑜</text:p>
          </table:table-cell>
          <table:table-cell office:value-type="string" calcext:value-type="string">
            <text:p>しゅうゆ</text:p>
          </table:table-cell>
          <table:table-cell office:value-type="string" calcext:value-type="string">
            <text:p>三国の英傑デッキ</text:p>
          </table:table-cell>
          <table:table-cell table:formula="of:=VLOOKUP([.G123];[$収録番号.$A$1:$収録番号.$B$9];2;0)" office:value-type="float" office:value="20" calcext:value-type="float">
            <text:p>20</text:p>
          </table:table-cell>
          <table:table-cell office:value-type="string" calcext:value-type="string">
            <text:p>N</text:p>
          </table:table-cell>
          <table:table-cell table:formula="of:=VLOOKUP([.I123];[$レアリティ番号.$A$1:$レアリティ番号.$B$4];2;0)" office:value-type="float" office:value="1" calcext:value-type="float">
            <text:p>1</text:p>
          </table:table-cell>
          <table:table-cell office:value-type="string" calcext:value-type="string">
            <text:p>イジン</text:p>
          </table:table-cell>
          <table:table-cell table:formula="of:=VLOOKUP([.K123];[$種類番号.$A$1:$種類番号.$B$4];2;0)" office:value-type="float" office:value="1" calcext:value-type="float">
            <text:p>1</text:p>
          </table:table-cell>
          <table:table-cell office:value-type="string" calcext:value-type="string">
            <text:p>黄</text:p>
          </table:table-cell>
          <table:table-cell table:formula="of:=VLOOKUP([.M123];[$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2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23];[$特性番号.$A$1:$特性番号.$B$8];2;0);0)" office:value-type="float" office:value="0" calcext:value-type="float">
            <text:p>0</text:p>
          </table:table-cell>
          <table:table-cell office:value-type="string" calcext:value-type="string">
            <text:p>カードが相手の墓地に5枚以下しかない間「ウォッチャー」を得る。¶自分の戦場の「即応」を持つイジン1体につき「アタック+1000」を得る。</text:p>
          </table:table-cell>
          <table:table-cell table:style-name="ce8" office:value-type="string" calcext:value-type="string">
            <text:p>魔力化</text:p>
          </table:table-cell>
          <table:table-cell table:formula="of:=IFERROR(VLOOKUP([.$V123];[$遺業能力番号.$A$1:$遺業能力番号.$B$9];2;0);0)" office:value-type="float" office:value="1" calcext:value-type="float">
            <text:p>1</text:p>
          </table:table-cell>
          <table:table-cell office:value-type="string" calcext:value-type="string">
            <text:p>https://one-draw.jp/ijinden/cardlist/Y01/card/02_Y_003.png</text:p>
          </table:table-cell>
          <table:table-cell table:formula="of:=CONCATENATE([$JSON.$A$1];[.$C123];[$JSON.$B$1];[.$E123];[$JSON.$C$1];[.$F123];[$JSON.$D$1];IF(ISNA([.$S123]);&quot;null&quot;;&quot;&quot;&quot;&quot;&amp;[.$S123]&amp;&quot;&quot;&quot;&quot;);[$JSON.$E$1];[.$U123];[$JSON.$F$1];IF(ISNA([.$V123]);&quot;null&quot;;&quot;&quot;&quot;&quot;&amp;[.$V123]&amp;&quot;&quot;&quot;&quot;);[$JSON.$G$1];[.$X123];[$JSON.$H$1];[.$H123];[$JSON.$I$1];[.J123];[$JSON.$J$1];[.$L123];[$JSON.$K$1];[.$O123];[$JSON.$L$1];[.$N123];[$JSON.$M$1];[.$R123];[$JSON.$N$1];[.$T123];[$JSON.$O$1];[.$W123];[$JSON.$P$1];[.$A123];[$JSON.$Q$1];[.$B123];[$JSON.$R$1])" office:value-type="string" office:string-value="{&quot;id&quot;:&quot;Y-3&quot;,&quot;name&quot;:&quot;周瑜&quot;,&quot;kana&quot;:&quot;しゅうゆ&quot;,&quot;traitText&quot;:null,&quot;ruleText&quot;:&quot;カードが相手の墓地に5枚以下しかない間「ウォッチャー」を得る。¶自分の戦場の「即応」を持つイジン1体につき「アタック+1000」を得る。&quot;,&quot;legacyText&quot;:&quot;魔力化&quot;,&quot;imageUrl&quot;:&quot;https://one-draw.jp/ijinden/cardlist/Y01/card/02_Y_003.png&quot;,&quot;expansion&quot;:20,&quot;rarity&quot;:1,&quot;type&quot;:1,&quot;level&quot;:4,&quot;color&quot;:8,&quot;term&quot;:0,&quot;trait&quot;:0,&quot;legacy&quot;:1,&quot;orderTable&quot;:122,&quot;orderDeck&quot;:132}," calcext:value-type="string">
            <text:p>{"id":"Y-3","name":"周瑜","kana":"しゅうゆ","traitText":null,"ruleText":"カードが相手の墓地に5枚以下しかない間「ウォッチャー」を得る。¶自分の戦場の「即応」を持つイジン1体につき「アタック+1000」を得る。","legacyText":"魔力化","imageUrl":"https://one-draw.jp/ijinden/cardlist/Y01/card/02_Y_003.png","expansion":20,"rarity":1,"type":1,"level":4,"color":8,"term":0,"trait":0,"legacy":1,"orderTable":122,"orderDeck":132},</text:p>
          </table:table-cell>
          <table:table-cell table:number-columns-repeated="16347"/>
        </table:table-row>
        <table:table-row table:style-name="ro2">
          <table:table-cell office:value-type="float" office:value="123" calcext:value-type="float">
            <text:p>123</text:p>
          </table:table-cell>
          <table:table-cell office:value-type="float" office:value="171" calcext:value-type="float">
            <text:p>171</text:p>
          </table:table-cell>
          <table:table-cell office:value-type="string" calcext:value-type="string">
            <text:p>Y-4</text:p>
          </table:table-cell>
          <table:table-cell office:value-type="float" office:value="4" calcext:value-type="float">
            <text:p>4</text:p>
          </table:table-cell>
          <table:table-cell office:value-type="string" calcext:value-type="string">
            <text:p>孫権</text:p>
          </table:table-cell>
          <table:table-cell office:value-type="string" calcext:value-type="string">
            <text:p>そんけん</text:p>
          </table:table-cell>
          <table:table-cell office:value-type="string" calcext:value-type="string">
            <text:p>三国の英傑デッキ</text:p>
          </table:table-cell>
          <table:table-cell table:formula="of:=VLOOKUP([.G124];[$収録番号.$A$1:$収録番号.$B$9];2;0)" office:value-type="float" office:value="20" calcext:value-type="float">
            <text:p>20</text:p>
          </table:table-cell>
          <table:table-cell office:value-type="string" calcext:value-type="string">
            <text:p>N</text:p>
          </table:table-cell>
          <table:table-cell table:formula="of:=VLOOKUP([.I124];[$レアリティ番号.$A$1:$レアリティ番号.$B$4];2;0)" office:value-type="float" office:value="1" calcext:value-type="float">
            <text:p>1</text:p>
          </table:table-cell>
          <table:table-cell office:value-type="string" calcext:value-type="string">
            <text:p>イジン</text:p>
          </table:table-cell>
          <table:table-cell table:formula="of:=VLOOKUP([.K124];[$種類番号.$A$1:$種類番号.$B$4];2;0)" office:value-type="float" office:value="1" calcext:value-type="float">
            <text:p>1</text:p>
          </table:table-cell>
          <table:table-cell office:value-type="string" calcext:value-type="string">
            <text:p>黄</text:p>
          </table:table-cell>
          <table:table-cell table:formula="of:=VLOOKUP([.M124];[$色番号.$A$1:$色番号.$B$10];2;0)" office:value-type="float" office:value="8" calcext:value-type="float">
            <text:p>8</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2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24];[$特性番号.$A$1:$特性番号.$B$8];2;0);0)" office:value-type="float" office:value="0" calcext:value-type="float">
            <text:p>0</text:p>
          </table:table-cell>
          <table:table-cell office:value-type="string" calcext:value-type="string">
            <text:p>即応¶ウォッチャー¶自分の戦場の赤のイジンが寝るたびに発動できる。自分の手札1枚を墓地に置いて、1ドローする。</text:p>
          </table:table-cell>
          <table:table-cell table:style-name="ce8" table:formula="of:=NA()" office:value-type="string" office:string-value="" calcext:value-type="error">
            <text:p>#N/A</text:p>
          </table:table-cell>
          <table:table-cell table:formula="of:=IFERROR(VLOOKUP([.$V124];[$遺業能力番号.$A$1:$遺業能力番号.$B$9];2;0);0)" office:value-type="float" office:value="0" calcext:value-type="float">
            <text:p>0</text:p>
          </table:table-cell>
          <table:table-cell office:value-type="string" calcext:value-type="string">
            <text:p>https://one-draw.jp/ijinden/cardlist/Y01/card/02_Y_004.png</text:p>
          </table:table-cell>
          <table:table-cell table:formula="of:=CONCATENATE([$JSON.$A$1];[.$C124];[$JSON.$B$1];[.$E124];[$JSON.$C$1];[.$F124];[$JSON.$D$1];IF(ISNA([.$S124]);&quot;null&quot;;&quot;&quot;&quot;&quot;&amp;[.$S124]&amp;&quot;&quot;&quot;&quot;);[$JSON.$E$1];[.$U124];[$JSON.$F$1];IF(ISNA([.$V124]);&quot;null&quot;;&quot;&quot;&quot;&quot;&amp;[.$V124]&amp;&quot;&quot;&quot;&quot;);[$JSON.$G$1];[.$X124];[$JSON.$H$1];[.$H124];[$JSON.$I$1];[.J124];[$JSON.$J$1];[.$L124];[$JSON.$K$1];[.$O124];[$JSON.$L$1];[.$N124];[$JSON.$M$1];[.$R124];[$JSON.$N$1];[.$T124];[$JSON.$O$1];[.$W124];[$JSON.$P$1];[.$A124];[$JSON.$Q$1];[.$B124];[$JSON.$R$1])" office:value-type="string" office:string-value="{&quot;id&quot;:&quot;Y-4&quot;,&quot;name&quot;:&quot;孫権&quot;,&quot;kana&quot;:&quot;そんけん&quot;,&quot;traitText&quot;:null,&quot;ruleText&quot;:&quot;即応¶ウォッチャー¶自分の戦場の赤のイジンが寝るたびに発動できる。自分の手札1枚を墓地に置いて、1ドローする。&quot;,&quot;legacyText&quot;:null,&quot;imageUrl&quot;:&quot;https://one-draw.jp/ijinden/cardlist/Y01/card/02_Y_004.png&quot;,&quot;expansion&quot;:20,&quot;rarity&quot;:1,&quot;type&quot;:1,&quot;level&quot;:5,&quot;color&quot;:8,&quot;term&quot;:0,&quot;trait&quot;:0,&quot;legacy&quot;:0,&quot;orderTable&quot;:123,&quot;orderDeck&quot;:171}," calcext:value-type="string">
            <text:p>{"id":"Y-4","name":"孫権","kana":"そんけん","traitText":null,"ruleText":"即応¶ウォッチャー¶自分の戦場の赤のイジンが寝るたびに発動できる。自分の手札1枚を墓地に置いて、1ドローする。","legacyText":null,"imageUrl":"https://one-draw.jp/ijinden/cardlist/Y01/card/02_Y_004.png","expansion":20,"rarity":1,"type":1,"level":5,"color":8,"term":0,"trait":0,"legacy":0,"orderTable":123,"orderDeck":171},</text:p>
          </table:table-cell>
          <table:table-cell table:number-columns-repeated="16347"/>
        </table:table-row>
        <table:table-row table:style-name="ro2">
          <table:table-cell office:value-type="float" office:value="124" calcext:value-type="float">
            <text:p>124</text:p>
          </table:table-cell>
          <table:table-cell office:value-type="float" office:value="213" calcext:value-type="float">
            <text:p>213</text:p>
          </table:table-cell>
          <table:table-cell office:value-type="string" calcext:value-type="string">
            <text:p>Y-5</text:p>
          </table:table-cell>
          <table:table-cell office:value-type="float" office:value="5" calcext:value-type="float">
            <text:p>5</text:p>
          </table:table-cell>
          <table:table-cell office:value-type="string" calcext:value-type="string">
            <text:p>シャクシャイン</text:p>
          </table:table-cell>
          <table:table-cell office:value-type="string" calcext:value-type="string">
            <text:p>しゃくしゃいん</text:p>
          </table:table-cell>
          <table:table-cell office:value-type="string" calcext:value-type="string">
            <text:p>三国の英傑デッキ</text:p>
          </table:table-cell>
          <table:table-cell table:formula="of:=VLOOKUP([.G125];[$収録番号.$A$1:$収録番号.$B$9];2;0)" office:value-type="float" office:value="20" calcext:value-type="float">
            <text:p>20</text:p>
          </table:table-cell>
          <table:table-cell office:value-type="string" calcext:value-type="string">
            <text:p>N</text:p>
          </table:table-cell>
          <table:table-cell table:formula="of:=VLOOKUP([.I125];[$レアリティ番号.$A$1:$レアリティ番号.$B$4];2;0)" office:value-type="float" office:value="1" calcext:value-type="float">
            <text:p>1</text:p>
          </table:table-cell>
          <table:table-cell office:value-type="string" calcext:value-type="string">
            <text:p>イジン</text:p>
          </table:table-cell>
          <table:table-cell table:formula="of:=VLOOKUP([.K125];[$種類番号.$A$1:$種類番号.$B$4];2;0)" office:value-type="float" office:value="1" calcext:value-type="float">
            <text:p>1</text:p>
          </table:table-cell>
          <table:table-cell office:value-type="string" calcext:value-type="string">
            <text:p>黄</text:p>
          </table:table-cell>
          <table:table-cell table:formula="of:=VLOOKUP([.M125];[$色番号.$A$1:$色番号.$B$10];2;0)" office:value-type="float" office:value="8" calcext:value-type="float">
            <text:p>8</text:p>
          </table:table-cell>
          <table:table-cell office:value-type="float" office:value="7" calcext:value-type="float">
            <text:p>7</text:p>
          </table:table-cell>
          <table:table-cell table:formula="of:=NA()" office:value-type="string" office:string-value="" calcext:value-type="error">
            <text:p>#N/A</text:p>
          </table:table-cell>
          <table:table-cell office:value-type="string" calcext:value-type="string">
            <text:p>決起</text:p>
          </table:table-cell>
          <table:table-cell table:formula="of:=IFERROR(VLOOKUP([.$Q125];[$能力語番号.$A$1:$能力語番号.$B$10];2;0);0)" office:value-type="float" office:value="4" calcext:value-type="float">
            <text:p>4</text:p>
          </table:table-cell>
          <table:table-cell table:formula="of:=NA()" office:value-type="string" office:string-value="" calcext:value-type="error">
            <text:p>#N/A</text:p>
          </table:table-cell>
          <table:table-cell table:formula="of:=IFERROR(VLOOKUP([.$S125];[$特性番号.$A$1:$特性番号.$B$8];2;0);0)" office:value-type="float" office:value="0" calcext:value-type="float">
            <text:p>0</text:p>
          </table:table-cell>
          <table:table-cell office:value-type="string" calcext:value-type="string">
            <text:p>ダブルプレッシャー¶決起 - マリョク配置によってカードが自分の魔力ゾーンに置かれたとき、自分の魔力ゾーンのマリョクが4つ以上なら発動できる。相手の戦場のイジン1体につき、相手の戦場のガーディアン1体を寝かせる。</text:p>
          </table:table-cell>
          <table:table-cell table:style-name="ce8" table:formula="of:=NA()" office:value-type="string" office:string-value="" calcext:value-type="error">
            <text:p>#N/A</text:p>
          </table:table-cell>
          <table:table-cell table:formula="of:=IFERROR(VLOOKUP([.$V125];[$遺業能力番号.$A$1:$遺業能力番号.$B$9];2;0);0)" office:value-type="float" office:value="0" calcext:value-type="float">
            <text:p>0</text:p>
          </table:table-cell>
          <table:table-cell office:value-type="string" calcext:value-type="string">
            <text:p>https://one-draw.jp/ijinden/cardlist/Y01/card/02_Y_005.png</text:p>
          </table:table-cell>
          <table:table-cell table:formula="of:=CONCATENATE([$JSON.$A$1];[.$C125];[$JSON.$B$1];[.$E125];[$JSON.$C$1];[.$F125];[$JSON.$D$1];IF(ISNA([.$S125]);&quot;null&quot;;&quot;&quot;&quot;&quot;&amp;[.$S125]&amp;&quot;&quot;&quot;&quot;);[$JSON.$E$1];[.$U125];[$JSON.$F$1];IF(ISNA([.$V125]);&quot;null&quot;;&quot;&quot;&quot;&quot;&amp;[.$V125]&amp;&quot;&quot;&quot;&quot;);[$JSON.$G$1];[.$X125];[$JSON.$H$1];[.$H125];[$JSON.$I$1];[.J125];[$JSON.$J$1];[.$L125];[$JSON.$K$1];[.$O125];[$JSON.$L$1];[.$N125];[$JSON.$M$1];[.$R125];[$JSON.$N$1];[.$T125];[$JSON.$O$1];[.$W125];[$JSON.$P$1];[.$A125];[$JSON.$Q$1];[.$B125];[$JSON.$R$1])" office:value-type="string" office:string-value="{&quot;id&quot;:&quot;Y-5&quot;,&quot;name&quot;:&quot;シャクシャイン&quot;,&quot;kana&quot;:&quot;しゃくしゃいん&quot;,&quot;traitText&quot;:null,&quot;ruleText&quot;:&quot;ダブルプレッシャー¶決起 - マリョク配置によってカードが自分の魔力ゾーンに置かれたとき、自分の魔力ゾーンのマリョクが4つ以上なら発動できる。相手の戦場のイジン1体につき、相手の戦場のガーディアン1体を寝かせる。&quot;,&quot;legacyText&quot;:null,&quot;imageUrl&quot;:&quot;https://one-draw.jp/ijinden/cardlist/Y01/card/02_Y_005.png&quot;,&quot;expansion&quot;:20,&quot;rarity&quot;:1,&quot;type&quot;:1,&quot;level&quot;:7,&quot;color&quot;:8,&quot;term&quot;:4,&quot;trait&quot;:0,&quot;legacy&quot;:0,&quot;orderTable&quot;:124,&quot;orderDeck&quot;:213}," calcext:value-type="string">
            <text:p>{"id":"Y-5","name":"シャクシャイン","kana":"しゃくしゃいん","traitText":null,"ruleText":"ダブルプレッシャー¶決起 - マリョク配置によってカードが自分の魔力ゾーンに置かれたとき、自分の魔力ゾーンのマリョクが4つ以上なら発動できる。相手の戦場のイジン1体につき、相手の戦場のガーディアン1体を寝かせる。","legacyText":null,"imageUrl":"https://one-draw.jp/ijinden/cardlist/Y01/card/02_Y_005.png","expansion":20,"rarity":1,"type":1,"level":7,"color":8,"term":4,"trait":0,"legacy":0,"orderTable":124,"orderDeck":213},</text:p>
          </table:table-cell>
          <table:table-cell table:number-columns-repeated="16347"/>
        </table:table-row>
        <table:table-row table:style-name="ro2">
          <table:table-cell office:value-type="float" office:value="125" calcext:value-type="float">
            <text:p>125</text:p>
          </table:table-cell>
          <table:table-cell office:value-type="float" office:value="197" calcext:value-type="float">
            <text:p>197</text:p>
          </table:table-cell>
          <table:table-cell office:value-type="string" calcext:value-type="string">
            <text:p>Y-6</text:p>
          </table:table-cell>
          <table:table-cell office:value-type="float" office:value="6" calcext:value-type="float">
            <text:p>6</text:p>
          </table:table-cell>
          <table:table-cell office:value-type="string" calcext:value-type="string">
            <text:p>フビライ・ハン</text:p>
          </table:table-cell>
          <table:table-cell office:value-type="string" calcext:value-type="string">
            <text:p>ふびらいはん</text:p>
          </table:table-cell>
          <table:table-cell office:value-type="string" calcext:value-type="string">
            <text:p>三国の英傑デッキ</text:p>
          </table:table-cell>
          <table:table-cell table:formula="of:=VLOOKUP([.G126];[$収録番号.$A$1:$収録番号.$B$9];2;0)" office:value-type="float" office:value="20" calcext:value-type="float">
            <text:p>20</text:p>
          </table:table-cell>
          <table:table-cell office:value-type="string" calcext:value-type="string">
            <text:p>N</text:p>
          </table:table-cell>
          <table:table-cell table:formula="of:=VLOOKUP([.I126];[$レアリティ番号.$A$1:$レアリティ番号.$B$4];2;0)" office:value-type="float" office:value="1" calcext:value-type="float">
            <text:p>1</text:p>
          </table:table-cell>
          <table:table-cell office:value-type="string" calcext:value-type="string">
            <text:p>イジン</text:p>
          </table:table-cell>
          <table:table-cell table:formula="of:=VLOOKUP([.K126];[$種類番号.$A$1:$種類番号.$B$4];2;0)" office:value-type="float" office:value="1" calcext:value-type="float">
            <text:p>1</text:p>
          </table:table-cell>
          <table:table-cell office:value-type="string" calcext:value-type="string">
            <text:p>黄</text:p>
          </table:table-cell>
          <table:table-cell table:formula="of:=VLOOKUP([.M126];[$色番号.$A$1:$色番号.$B$10];2;0)" office:value-type="float" office:value="8" calcext:value-type="float">
            <text:p>8</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2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26];[$特性番号.$A$1:$特性番号.$B$8];2;0);0)" office:value-type="float" office:value="0" calcext:value-type="float">
            <text:p>0</text:p>
          </table:table-cell>
          <table:table-cell office:value-type="string" calcext:value-type="string">
            <text:p>ダブルプレッシャー¶戦場に置かれたとき、自分の魔力ゾーンの『ストーン』マリョク2つまでをガーディアンにして戦場に置く。</text:p>
          </table:table-cell>
          <table:table-cell table:style-name="ce8" table:formula="of:=NA()" office:value-type="string" office:string-value="" calcext:value-type="error">
            <text:p>#N/A</text:p>
          </table:table-cell>
          <table:table-cell table:formula="of:=IFERROR(VLOOKUP([.$V126];[$遺業能力番号.$A$1:$遺業能力番号.$B$9];2;0);0)" office:value-type="float" office:value="0" calcext:value-type="float">
            <text:p>0</text:p>
          </table:table-cell>
          <table:table-cell office:value-type="string" calcext:value-type="string">
            <text:p>https://one-draw.jp/ijinden/cardlist/Y01/card/02_Y_006.png</text:p>
          </table:table-cell>
          <table:table-cell table:formula="of:=CONCATENATE([$JSON.$A$1];[.$C126];[$JSON.$B$1];[.$E126];[$JSON.$C$1];[.$F126];[$JSON.$D$1];IF(ISNA([.$S126]);&quot;null&quot;;&quot;&quot;&quot;&quot;&amp;[.$S126]&amp;&quot;&quot;&quot;&quot;);[$JSON.$E$1];[.$U126];[$JSON.$F$1];IF(ISNA([.$V126]);&quot;null&quot;;&quot;&quot;&quot;&quot;&amp;[.$V126]&amp;&quot;&quot;&quot;&quot;);[$JSON.$G$1];[.$X126];[$JSON.$H$1];[.$H126];[$JSON.$I$1];[.J126];[$JSON.$J$1];[.$L126];[$JSON.$K$1];[.$O126];[$JSON.$L$1];[.$N126];[$JSON.$M$1];[.$R126];[$JSON.$N$1];[.$T126];[$JSON.$O$1];[.$W126];[$JSON.$P$1];[.$A126];[$JSON.$Q$1];[.$B126];[$JSON.$R$1])" office:value-type="string" office:string-value="{&quot;id&quot;:&quot;Y-6&quot;,&quot;name&quot;:&quot;フビライ・ハン&quot;,&quot;kana&quot;:&quot;ふびらいはん&quot;,&quot;traitText&quot;:null,&quot;ruleText&quot;:&quot;ダブルプレッシャー¶戦場に置かれたとき、自分の魔力ゾーンの『ストーン』マリョク2つまでをガーディアンにして戦場に置く。&quot;,&quot;legacyText&quot;:null,&quot;imageUrl&quot;:&quot;https://one-draw.jp/ijinden/cardlist/Y01/card/02_Y_006.png&quot;,&quot;expansion&quot;:20,&quot;rarity&quot;:1,&quot;type&quot;:1,&quot;level&quot;:6,&quot;color&quot;:8,&quot;term&quot;:0,&quot;trait&quot;:0,&quot;legacy&quot;:0,&quot;orderTable&quot;:125,&quot;orderDeck&quot;:197}," calcext:value-type="string">
            <text:p>{"id":"Y-6","name":"フビライ・ハン","kana":"ふびらいはん","traitText":null,"ruleText":"ダブルプレッシャー¶戦場に置かれたとき、自分の魔力ゾーンの『ストーン』マリョク2つまでをガーディアンにして戦場に置く。","legacyText":null,"imageUrl":"https://one-draw.jp/ijinden/cardlist/Y01/card/02_Y_006.png","expansion":20,"rarity":1,"type":1,"level":6,"color":8,"term":0,"trait":0,"legacy":0,"orderTable":125,"orderDeck":197},</text:p>
          </table:table-cell>
          <table:table-cell table:number-columns-repeated="16347"/>
        </table:table-row>
        <table:table-row table:style-name="ro2">
          <table:table-cell office:value-type="float" office:value="126" calcext:value-type="float">
            <text:p>126</text:p>
          </table:table-cell>
          <table:table-cell office:value-type="float" office:value="53" calcext:value-type="float">
            <text:p>53</text:p>
          </table:table-cell>
          <table:table-cell office:value-type="string" calcext:value-type="string">
            <text:p>Y-7</text:p>
          </table:table-cell>
          <table:table-cell office:value-type="float" office:value="7" calcext:value-type="float">
            <text:p>7</text:p>
          </table:table-cell>
          <table:table-cell office:value-type="string" calcext:value-type="string">
            <text:p>足利義教</text:p>
          </table:table-cell>
          <table:table-cell office:value-type="string" calcext:value-type="string">
            <text:p>あしかがよしのり</text:p>
          </table:table-cell>
          <table:table-cell office:value-type="string" calcext:value-type="string">
            <text:p>三国の英傑デッキ</text:p>
          </table:table-cell>
          <table:table-cell table:formula="of:=VLOOKUP([.G127];[$収録番号.$A$1:$収録番号.$B$9];2;0)" office:value-type="float" office:value="20" calcext:value-type="float">
            <text:p>20</text:p>
          </table:table-cell>
          <table:table-cell office:value-type="string" calcext:value-type="string">
            <text:p>N</text:p>
          </table:table-cell>
          <table:table-cell table:formula="of:=VLOOKUP([.I127];[$レアリティ番号.$A$1:$レアリティ番号.$B$4];2;0)" office:value-type="float" office:value="1" calcext:value-type="float">
            <text:p>1</text:p>
          </table:table-cell>
          <table:table-cell office:value-type="string" calcext:value-type="string">
            <text:p>イジン</text:p>
          </table:table-cell>
          <table:table-cell table:formula="of:=VLOOKUP([.K127];[$種類番号.$A$1:$種類番号.$B$4];2;0)" office:value-type="float" office:value="1" calcext:value-type="float">
            <text:p>1</text:p>
          </table:table-cell>
          <table:table-cell office:value-type="string" calcext:value-type="string">
            <text:p>黄</text:p>
          </table:table-cell>
          <table:table-cell table:formula="of:=VLOOKUP([.M127];[$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2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27];[$特性番号.$A$1:$特性番号.$B$8];2;0);0)" office:value-type="float" office:value="0" calcext:value-type="float">
            <text:p>0</text:p>
          </table:table-cell>
          <table:table-cell office:value-type="string" calcext:value-type="string">
            <text:p>この能力はターンに1回しか発動しない。自分の墓地の「遺業能力」が発動したときに発動できる。1ドローする。</text:p>
          </table:table-cell>
          <table:table-cell table:style-name="ce8" table:formula="of:=NA()" office:value-type="string" office:string-value="" calcext:value-type="error">
            <text:p>#N/A</text:p>
          </table:table-cell>
          <table:table-cell table:formula="of:=IFERROR(VLOOKUP([.$V127];[$遺業能力番号.$A$1:$遺業能力番号.$B$9];2;0);0)" office:value-type="float" office:value="0" calcext:value-type="float">
            <text:p>0</text:p>
          </table:table-cell>
          <table:table-cell office:value-type="string" calcext:value-type="string">
            <text:p>https://one-draw.jp/ijinden/cardlist/Y01/card/02_Y_007.png</text:p>
          </table:table-cell>
          <table:table-cell table:formula="of:=CONCATENATE([$JSON.$A$1];[.$C127];[$JSON.$B$1];[.$E127];[$JSON.$C$1];[.$F127];[$JSON.$D$1];IF(ISNA([.$S127]);&quot;null&quot;;&quot;&quot;&quot;&quot;&amp;[.$S127]&amp;&quot;&quot;&quot;&quot;);[$JSON.$E$1];[.$U127];[$JSON.$F$1];IF(ISNA([.$V127]);&quot;null&quot;;&quot;&quot;&quot;&quot;&amp;[.$V127]&amp;&quot;&quot;&quot;&quot;);[$JSON.$G$1];[.$X127];[$JSON.$H$1];[.$H127];[$JSON.$I$1];[.J127];[$JSON.$J$1];[.$L127];[$JSON.$K$1];[.$O127];[$JSON.$L$1];[.$N127];[$JSON.$M$1];[.$R127];[$JSON.$N$1];[.$T127];[$JSON.$O$1];[.$W127];[$JSON.$P$1];[.$A127];[$JSON.$Q$1];[.$B127];[$JSON.$R$1])" office:value-type="string" office:string-value="{&quot;id&quot;:&quot;Y-7&quot;,&quot;name&quot;:&quot;足利義教&quot;,&quot;kana&quot;:&quot;あしかがよしのり&quot;,&quot;traitText&quot;:null,&quot;ruleText&quot;:&quot;この能力はターンに1回しか発動しない。自分の墓地の「遺業能力」が発動したときに発動できる。1ドローする。&quot;,&quot;legacyText&quot;:null,&quot;imageUrl&quot;:&quot;https://one-draw.jp/ijinden/cardlist/Y01/card/02_Y_007.png&quot;,&quot;expansion&quot;:20,&quot;rarity&quot;:1,&quot;type&quot;:1,&quot;level&quot;:2,&quot;color&quot;:8,&quot;term&quot;:0,&quot;trait&quot;:0,&quot;legacy&quot;:0,&quot;orderTable&quot;:126,&quot;orderDeck&quot;:53}," calcext:value-type="string">
            <text:p>{"id":"Y-7","name":"足利義教","kana":"あしかがよしのり","traitText":null,"ruleText":"この能力はターンに1回しか発動しない。自分の墓地の「遺業能力」が発動したときに発動できる。1ドローする。","legacyText":null,"imageUrl":"https://one-draw.jp/ijinden/cardlist/Y01/card/02_Y_007.png","expansion":20,"rarity":1,"type":1,"level":2,"color":8,"term":0,"trait":0,"legacy":0,"orderTable":126,"orderDeck":53},</text:p>
          </table:table-cell>
          <table:table-cell table:number-columns-repeated="16347"/>
        </table:table-row>
        <table:table-row table:style-name="ro2">
          <table:table-cell office:value-type="float" office:value="127" calcext:value-type="float">
            <text:p>127</text:p>
          </table:table-cell>
          <table:table-cell office:value-type="float" office:value="15" calcext:value-type="float">
            <text:p>15</text:p>
          </table:table-cell>
          <table:table-cell office:value-type="string" calcext:value-type="string">
            <text:p>Y-8</text:p>
          </table:table-cell>
          <table:table-cell office:value-type="float" office:value="8" calcext:value-type="float">
            <text:p>8</text:p>
          </table:table-cell>
          <table:table-cell office:value-type="string" calcext:value-type="string">
            <text:p>ヴィジェ＝ルブラン</text:p>
          </table:table-cell>
          <table:table-cell office:value-type="string" calcext:value-type="string">
            <text:p>ゔぃじぇるぶらん</text:p>
          </table:table-cell>
          <table:table-cell office:value-type="string" calcext:value-type="string">
            <text:p>三国の英傑デッキ</text:p>
          </table:table-cell>
          <table:table-cell table:formula="of:=VLOOKUP([.G128];[$収録番号.$A$1:$収録番号.$B$9];2;0)" office:value-type="float" office:value="20" calcext:value-type="float">
            <text:p>20</text:p>
          </table:table-cell>
          <table:table-cell office:value-type="string" calcext:value-type="string">
            <text:p>N</text:p>
          </table:table-cell>
          <table:table-cell table:formula="of:=VLOOKUP([.I128];[$レアリティ番号.$A$1:$レアリティ番号.$B$4];2;0)" office:value-type="float" office:value="1" calcext:value-type="float">
            <text:p>1</text:p>
          </table:table-cell>
          <table:table-cell office:value-type="string" calcext:value-type="string">
            <text:p>イジン</text:p>
          </table:table-cell>
          <table:table-cell table:formula="of:=VLOOKUP([.K128];[$種類番号.$A$1:$種類番号.$B$4];2;0)" office:value-type="float" office:value="1" calcext:value-type="float">
            <text:p>1</text:p>
          </table:table-cell>
          <table:table-cell office:value-type="string" calcext:value-type="string">
            <text:p>黄</text:p>
          </table:table-cell>
          <table:table-cell table:formula="of:=VLOOKUP([.M128];[$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28];[$能力語番号.$A$1:$能力語番号.$B$10];2;0);0)" office:value-type="float" office:value="0" calcext:value-type="float">
            <text:p>0</text:p>
          </table:table-cell>
          <table:table-cell office:value-type="string" calcext:value-type="string">
            <text:p>美術</text:p>
          </table:table-cell>
          <table:table-cell table:formula="of:=IFERROR(VLOOKUP([.$S128];[$特性番号.$A$1:$特性番号.$B$8];2;0);0)" office:value-type="float" office:value="2" calcext:value-type="float">
            <text:p>2</text:p>
          </table:table-cell>
          <table:table-cell office:value-type="string" calcext:value-type="string">
            <text:p>戦場に置かれたとき、自分の戦場のガーディアン1体を墓地に置いて、自分の山札の上から1枚をガーディアンにして戦場に置く。</text:p>
          </table:table-cell>
          <table:table-cell table:style-name="ce8" office:value-type="string" calcext:value-type="string">
            <text:p>1ドローする</text:p>
          </table:table-cell>
          <table:table-cell table:formula="of:=IFERROR(VLOOKUP([.$V128];[$遺業能力番号.$A$1:$遺業能力番号.$B$9];2;0);0)" office:value-type="float" office:value="4" calcext:value-type="float">
            <text:p>4</text:p>
          </table:table-cell>
          <table:table-cell office:value-type="string" calcext:value-type="string">
            <text:p>https://one-draw.jp/ijinden/cardlist/Y01/card/02_Y_008.png</text:p>
          </table:table-cell>
          <table:table-cell table:formula="of:=CONCATENATE([$JSON.$A$1];[.$C128];[$JSON.$B$1];[.$E128];[$JSON.$C$1];[.$F128];[$JSON.$D$1];IF(ISNA([.$S128]);&quot;null&quot;;&quot;&quot;&quot;&quot;&amp;[.$S128]&amp;&quot;&quot;&quot;&quot;);[$JSON.$E$1];[.$U128];[$JSON.$F$1];IF(ISNA([.$V128]);&quot;null&quot;;&quot;&quot;&quot;&quot;&amp;[.$V128]&amp;&quot;&quot;&quot;&quot;);[$JSON.$G$1];[.$X128];[$JSON.$H$1];[.$H128];[$JSON.$I$1];[.J128];[$JSON.$J$1];[.$L128];[$JSON.$K$1];[.$O128];[$JSON.$L$1];[.$N128];[$JSON.$M$1];[.$R128];[$JSON.$N$1];[.$T128];[$JSON.$O$1];[.$W128];[$JSON.$P$1];[.$A128];[$JSON.$Q$1];[.$B128];[$JSON.$R$1])" office:value-type="string" office:string-value="{&quot;id&quot;:&quot;Y-8&quot;,&quot;name&quot;:&quot;ヴィジェ＝ルブラン&quot;,&quot;kana&quot;:&quot;ゔぃじぇるぶらん&quot;,&quot;traitText&quot;:&quot;美術&quot;,&quot;ruleText&quot;:&quot;戦場に置かれたとき、自分の戦場のガーディアン1体を墓地に置いて、自分の山札の上から1枚をガーディアンにして戦場に置く。&quot;,&quot;legacyText&quot;:&quot;1ドローする&quot;,&quot;imageUrl&quot;:&quot;https://one-draw.jp/ijinden/cardlist/Y01/card/02_Y_008.png&quot;,&quot;expansion&quot;:20,&quot;rarity&quot;:1,&quot;type&quot;:1,&quot;level&quot;:1,&quot;color&quot;:8,&quot;term&quot;:0,&quot;trait&quot;:2,&quot;legacy&quot;:4,&quot;orderTable&quot;:127,&quot;orderDeck&quot;:15}," calcext:value-type="string">
            <text:p>{"id":"Y-8","name":"ヴィジェ＝ルブラン","kana":"ゔぃじぇるぶらん","traitText":"美術","ruleText":"戦場に置かれたとき、自分の戦場のガーディアン1体を墓地に置いて、自分の山札の上から1枚をガーディアンにして戦場に置く。","legacyText":"1ドローする","imageUrl":"https://one-draw.jp/ijinden/cardlist/Y01/card/02_Y_008.png","expansion":20,"rarity":1,"type":1,"level":1,"color":8,"term":0,"trait":2,"legacy":4,"orderTable":127,"orderDeck":15},</text:p>
          </table:table-cell>
          <table:table-cell table:number-columns-repeated="16347"/>
        </table:table-row>
        <table:table-row table:style-name="ro2">
          <table:table-cell office:value-type="float" office:value="128" calcext:value-type="float">
            <text:p>128</text:p>
          </table:table-cell>
          <table:table-cell office:value-type="float" office:value="255" calcext:value-type="float">
            <text:p>255</text:p>
          </table:table-cell>
          <table:table-cell office:value-type="string" calcext:value-type="string">
            <text:p>Y-9</text:p>
          </table:table-cell>
          <table:table-cell office:value-type="float" office:value="9" calcext:value-type="float">
            <text:p>9</text:p>
          </table:table-cell>
          <table:table-cell office:value-type="string" calcext:value-type="string">
            <text:p>英傑集う大河</text:p>
          </table:table-cell>
          <table:table-cell office:value-type="string" calcext:value-type="string">
            <text:p>えいけつつどうたいが</text:p>
          </table:table-cell>
          <table:table-cell office:value-type="string" calcext:value-type="string">
            <text:p>三国の英傑デッキ</text:p>
          </table:table-cell>
          <table:table-cell table:formula="of:=VLOOKUP([.G129];[$収録番号.$A$1:$収録番号.$B$9];2;0)" office:value-type="float" office:value="20" calcext:value-type="float">
            <text:p>20</text:p>
          </table:table-cell>
          <table:table-cell office:value-type="string" calcext:value-type="string">
            <text:p>N</text:p>
          </table:table-cell>
          <table:table-cell table:formula="of:=VLOOKUP([.I129];[$レアリティ番号.$A$1:$レアリティ番号.$B$4];2;0)" office:value-type="float" office:value="1" calcext:value-type="float">
            <text:p>1</text:p>
          </table:table-cell>
          <table:table-cell office:value-type="string" calcext:value-type="string">
            <text:p>ハイケイ</text:p>
          </table:table-cell>
          <table:table-cell table:formula="of:=VLOOKUP([.K129];[$種類番号.$A$1:$種類番号.$B$4];2;0)" office:value-type="float" office:value="2" calcext:value-type="float">
            <text:p>2</text:p>
          </table:table-cell>
          <table:table-cell office:value-type="string" calcext:value-type="string">
            <text:p>黄</text:p>
          </table:table-cell>
          <table:table-cell table:formula="of:=VLOOKUP([.M129];[$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2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29];[$特性番号.$A$1:$特性番号.$B$8];2;0);0)" office:value-type="float" office:value="0" calcext:value-type="float">
            <text:p>0</text:p>
          </table:table-cell>
          <table:table-cell office:value-type="string" calcext:value-type="string">
            <text:p>これが戦場にある間、自分の戦場の黄のイジンは「色：赤 青 緑」を得る。¶相手が3体以上でアタックしたとき、アタッカー1体を指定して発動できる。そのアタッカーをアタッカーでない状態にして、これを破壊する。</text:p>
          </table:table-cell>
          <table:table-cell table:style-name="ce8" office:value-type="string" calcext:value-type="string">
            <text:p>山札の上か下に戻す</text:p>
          </table:table-cell>
          <table:table-cell table:formula="of:=IFERROR(VLOOKUP([.$V129];[$遺業能力番号.$A$1:$遺業能力番号.$B$9];2;0);0)" office:value-type="float" office:value="7" calcext:value-type="float">
            <text:p>7</text:p>
          </table:table-cell>
          <table:table-cell office:value-type="string" calcext:value-type="string">
            <text:p>https://one-draw.jp/ijinden/cardlist/Y01/card/02_Y_009.png</text:p>
          </table:table-cell>
          <table:table-cell table:formula="of:=CONCATENATE([$JSON.$A$1];[.$C129];[$JSON.$B$1];[.$E129];[$JSON.$C$1];[.$F129];[$JSON.$D$1];IF(ISNA([.$S129]);&quot;null&quot;;&quot;&quot;&quot;&quot;&amp;[.$S129]&amp;&quot;&quot;&quot;&quot;);[$JSON.$E$1];[.$U129];[$JSON.$F$1];IF(ISNA([.$V129]);&quot;null&quot;;&quot;&quot;&quot;&quot;&amp;[.$V129]&amp;&quot;&quot;&quot;&quot;);[$JSON.$G$1];[.$X129];[$JSON.$H$1];[.$H129];[$JSON.$I$1];[.J129];[$JSON.$J$1];[.$L129];[$JSON.$K$1];[.$O129];[$JSON.$L$1];[.$N129];[$JSON.$M$1];[.$R129];[$JSON.$N$1];[.$T129];[$JSON.$O$1];[.$W129];[$JSON.$P$1];[.$A129];[$JSON.$Q$1];[.$B129];[$JSON.$R$1])" office:value-type="string" office:string-value="{&quot;id&quot;:&quot;Y-9&quot;,&quot;name&quot;:&quot;英傑集う大河&quot;,&quot;kana&quot;:&quot;えいけつつどうたいが&quot;,&quot;traitText&quot;:null,&quot;ruleText&quot;:&quot;これが戦場にある間、自分の戦場の黄のイジンは「色：赤 青 緑」を得る。¶相手が3体以上でアタックしたとき、アタッカー1体を指定して発動できる。そのアタッカーをアタッカーでない状態にして、これを破壊する。&quot;,&quot;legacyText&quot;:&quot;山札の上か下に戻す&quot;,&quot;imageUrl&quot;:&quot;https://one-draw.jp/ijinden/cardlist/Y01/card/02_Y_009.png&quot;,&quot;expansion&quot;:20,&quot;rarity&quot;:1,&quot;type&quot;:2,&quot;level&quot;:3,&quot;color&quot;:8,&quot;term&quot;:0,&quot;trait&quot;:0,&quot;legacy&quot;:7,&quot;orderTable&quot;:128,&quot;orderDeck&quot;:255}," calcext:value-type="string">
            <text:p>{"id":"Y-9","name":"英傑集う大河","kana":"えいけつつどうたいが","traitText":null,"ruleText":"これが戦場にある間、自分の戦場の黄のイジンは「色：赤 青 緑」を得る。¶相手が3体以上でアタックしたとき、アタッカー1体を指定して発動できる。そのアタッカーをアタッカーでない状態にして、これを破壊する。","legacyText":"山札の上か下に戻す","imageUrl":"https://one-draw.jp/ijinden/cardlist/Y01/card/02_Y_009.png","expansion":20,"rarity":1,"type":2,"level":3,"color":8,"term":0,"trait":0,"legacy":7,"orderTable":128,"orderDeck":255},</text:p>
          </table:table-cell>
          <table:table-cell table:number-columns-repeated="16347"/>
        </table:table-row>
        <table:table-row table:style-name="ro2">
          <table:table-cell office:value-type="float" office:value="129" calcext:value-type="float">
            <text:p>129</text:p>
          </table:table-cell>
          <table:table-cell office:value-type="float" office:value="245" calcext:value-type="float">
            <text:p>245</text:p>
          </table:table-cell>
          <table:table-cell office:value-type="string" calcext:value-type="string">
            <text:p>Y-10</text:p>
          </table:table-cell>
          <table:table-cell office:value-type="float" office:value="10" calcext:value-type="float">
            <text:p>10</text:p>
          </table:table-cell>
          <table:table-cell office:value-type="string" calcext:value-type="string">
            <text:p>地上の紫微垣</text:p>
          </table:table-cell>
          <table:table-cell office:value-type="string" calcext:value-type="string">
            <text:p>ちじょうのしびえん</text:p>
          </table:table-cell>
          <table:table-cell office:value-type="string" calcext:value-type="string">
            <text:p>三国の英傑デッキ</text:p>
          </table:table-cell>
          <table:table-cell table:formula="of:=VLOOKUP([.G130];[$収録番号.$A$1:$収録番号.$B$9];2;0)" office:value-type="float" office:value="20" calcext:value-type="float">
            <text:p>20</text:p>
          </table:table-cell>
          <table:table-cell office:value-type="string" calcext:value-type="string">
            <text:p>N</text:p>
          </table:table-cell>
          <table:table-cell table:formula="of:=VLOOKUP([.I130];[$レアリティ番号.$A$1:$レアリティ番号.$B$4];2;0)" office:value-type="float" office:value="1" calcext:value-type="float">
            <text:p>1</text:p>
          </table:table-cell>
          <table:table-cell office:value-type="string" calcext:value-type="string">
            <text:p>ハイケイ</text:p>
          </table:table-cell>
          <table:table-cell table:formula="of:=VLOOKUP([.K130];[$種類番号.$A$1:$種類番号.$B$4];2;0)" office:value-type="float" office:value="2" calcext:value-type="float">
            <text:p>2</text:p>
          </table:table-cell>
          <table:table-cell office:value-type="string" calcext:value-type="string">
            <text:p>黄</text:p>
          </table:table-cell>
          <table:table-cell table:formula="of:=VLOOKUP([.M130];[$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3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30];[$特性番号.$A$1:$特性番号.$B$8];2;0);0)" office:value-type="float" office:value="0" calcext:value-type="float">
            <text:p>0</text:p>
          </table:table-cell>
          <table:table-cell office:value-type="string" calcext:value-type="string">
            <text:p>自分のマリョク配置に際し、表向きで置く限り、自分の墓地のマリョクも選べる。</text:p>
          </table:table-cell>
          <table:table-cell table:style-name="ce8" office:value-type="string" calcext:value-type="string">
            <text:p>山札の上か下に戻す</text:p>
          </table:table-cell>
          <table:table-cell table:formula="of:=IFERROR(VLOOKUP([.$V130];[$遺業能力番号.$A$1:$遺業能力番号.$B$9];2;0);0)" office:value-type="float" office:value="7" calcext:value-type="float">
            <text:p>7</text:p>
          </table:table-cell>
          <table:table-cell office:value-type="string" calcext:value-type="string">
            <text:p>https://one-draw.jp/ijinden/cardlist/Y01/card/02_Y_010.png</text:p>
          </table:table-cell>
          <table:table-cell table:formula="of:=CONCATENATE([$JSON.$A$1];[.$C130];[$JSON.$B$1];[.$E130];[$JSON.$C$1];[.$F130];[$JSON.$D$1];IF(ISNA([.$S130]);&quot;null&quot;;&quot;&quot;&quot;&quot;&amp;[.$S130]&amp;&quot;&quot;&quot;&quot;);[$JSON.$E$1];[.$U130];[$JSON.$F$1];IF(ISNA([.$V130]);&quot;null&quot;;&quot;&quot;&quot;&quot;&amp;[.$V130]&amp;&quot;&quot;&quot;&quot;);[$JSON.$G$1];[.$X130];[$JSON.$H$1];[.$H130];[$JSON.$I$1];[.J130];[$JSON.$J$1];[.$L130];[$JSON.$K$1];[.$O130];[$JSON.$L$1];[.$N130];[$JSON.$M$1];[.$R130];[$JSON.$N$1];[.$T130];[$JSON.$O$1];[.$W130];[$JSON.$P$1];[.$A130];[$JSON.$Q$1];[.$B130];[$JSON.$R$1])" office:value-type="string" office:string-value="{&quot;id&quot;:&quot;Y-10&quot;,&quot;name&quot;:&quot;地上の紫微垣&quot;,&quot;kana&quot;:&quot;ちじょうのしびえん&quot;,&quot;traitText&quot;:null,&quot;ruleText&quot;:&quot;自分のマリョク配置に際し、表向きで置く限り、自分の墓地のマリョクも選べる。&quot;,&quot;legacyText&quot;:&quot;山札の上か下に戻す&quot;,&quot;imageUrl&quot;:&quot;https://one-draw.jp/ijinden/cardlist/Y01/card/02_Y_010.png&quot;,&quot;expansion&quot;:20,&quot;rarity&quot;:1,&quot;type&quot;:2,&quot;level&quot;:2,&quot;color&quot;:8,&quot;term&quot;:0,&quot;trait&quot;:0,&quot;legacy&quot;:7,&quot;orderTable&quot;:129,&quot;orderDeck&quot;:245}," calcext:value-type="string">
            <text:p>{"id":"Y-10","name":"地上の紫微垣","kana":"ちじょうのしびえん","traitText":null,"ruleText":"自分のマリョク配置に際し、表向きで置く限り、自分の墓地のマリョクも選べる。","legacyText":"山札の上か下に戻す","imageUrl":"https://one-draw.jp/ijinden/cardlist/Y01/card/02_Y_010.png","expansion":20,"rarity":1,"type":2,"level":2,"color":8,"term":0,"trait":0,"legacy":7,"orderTable":129,"orderDeck":245},</text:p>
          </table:table-cell>
          <table:table-cell table:number-columns-repeated="16347"/>
        </table:table-row>
        <table:table-row table:style-name="ro2">
          <table:table-cell office:value-type="float" office:value="130" calcext:value-type="float">
            <text:p>130</text:p>
          </table:table-cell>
          <table:table-cell office:value-type="float" office:value="300" calcext:value-type="float">
            <text:p>300</text:p>
          </table:table-cell>
          <table:table-cell office:value-type="string" calcext:value-type="string">
            <text:p>Y-11</text:p>
          </table:table-cell>
          <table:table-cell office:value-type="float" office:value="11" calcext:value-type="float">
            <text:p>11</text:p>
          </table:table-cell>
          <table:table-cell office:value-type="string" calcext:value-type="string">
            <text:p>ネハン</text:p>
          </table:table-cell>
          <table:table-cell office:value-type="string" calcext:value-type="string">
            <text:p>ねはん</text:p>
          </table:table-cell>
          <table:table-cell office:value-type="string" calcext:value-type="string">
            <text:p>三国の英傑デッキ</text:p>
          </table:table-cell>
          <table:table-cell table:formula="of:=VLOOKUP([.G131];[$収録番号.$A$1:$収録番号.$B$9];2;0)" office:value-type="float" office:value="20" calcext:value-type="float">
            <text:p>20</text:p>
          </table:table-cell>
          <table:table-cell office:value-type="string" calcext:value-type="string">
            <text:p>N</text:p>
          </table:table-cell>
          <table:table-cell table:formula="of:=VLOOKUP([.I131];[$レアリティ番号.$A$1:$レアリティ番号.$B$4];2;0)" office:value-type="float" office:value="1" calcext:value-type="float">
            <text:p>1</text:p>
          </table:table-cell>
          <table:table-cell office:value-type="string" calcext:value-type="string">
            <text:p>マホウ</text:p>
          </table:table-cell>
          <table:table-cell table:formula="of:=VLOOKUP([.K131];[$種類番号.$A$1:$種類番号.$B$4];2;0)" office:value-type="float" office:value="3" calcext:value-type="float">
            <text:p>3</text:p>
          </table:table-cell>
          <table:table-cell office:value-type="string" calcext:value-type="string">
            <text:p>黄</text:p>
          </table:table-cell>
          <table:table-cell table:formula="of:=VLOOKUP([.M131];[$色番号.$A$1:$色番号.$B$10];2;0)" office:value-type="float" office:value="8" calcext:value-type="float">
            <text:p>8</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13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31];[$特性番号.$A$1:$特性番号.$B$8];2;0);0)" office:value-type="float" office:value="0" calcext:value-type="float">
            <text:p>0</text:p>
          </table:table-cell>
          <table:table-cell office:value-type="string" calcext:value-type="string">
            <text:p>戦場の寝ているカード1つを指定して発動できる。そのカードを山札の下に戻す。</text:p>
          </table:table-cell>
          <table:table-cell table:style-name="ce8" office:value-type="string" calcext:value-type="string">
            <text:p>冥府発動</text:p>
          </table:table-cell>
          <table:table-cell table:formula="of:=IFERROR(VLOOKUP([.$V131];[$遺業能力番号.$A$1:$遺業能力番号.$B$9];2;0);0)" office:value-type="float" office:value="2" calcext:value-type="float">
            <text:p>2</text:p>
          </table:table-cell>
          <table:table-cell office:value-type="string" calcext:value-type="string">
            <text:p>https://one-draw.jp/ijinden/cardlist/Y01/card/02_Y_011.png</text:p>
          </table:table-cell>
          <table:table-cell table:formula="of:=CONCATENATE([$JSON.$A$1];[.$C131];[$JSON.$B$1];[.$E131];[$JSON.$C$1];[.$F131];[$JSON.$D$1];IF(ISNA([.$S131]);&quot;null&quot;;&quot;&quot;&quot;&quot;&amp;[.$S131]&amp;&quot;&quot;&quot;&quot;);[$JSON.$E$1];[.$U131];[$JSON.$F$1];IF(ISNA([.$V131]);&quot;null&quot;;&quot;&quot;&quot;&quot;&amp;[.$V131]&amp;&quot;&quot;&quot;&quot;);[$JSON.$G$1];[.$X131];[$JSON.$H$1];[.$H131];[$JSON.$I$1];[.J131];[$JSON.$J$1];[.$L131];[$JSON.$K$1];[.$O131];[$JSON.$L$1];[.$N131];[$JSON.$M$1];[.$R131];[$JSON.$N$1];[.$T131];[$JSON.$O$1];[.$W131];[$JSON.$P$1];[.$A131];[$JSON.$Q$1];[.$B131];[$JSON.$R$1])" office:value-type="string" office:string-value="{&quot;id&quot;:&quot;Y-11&quot;,&quot;name&quot;:&quot;ネハン&quot;,&quot;kana&quot;:&quot;ねはん&quot;,&quot;traitText&quot;:null,&quot;ruleText&quot;:&quot;戦場の寝ているカード1つを指定して発動できる。そのカードを山札の下に戻す。&quot;,&quot;legacyText&quot;:&quot;冥府発動&quot;,&quot;imageUrl&quot;:&quot;https://one-draw.jp/ijinden/cardlist/Y01/card/02_Y_011.png&quot;,&quot;expansion&quot;:20,&quot;rarity&quot;:1,&quot;type&quot;:3,&quot;level&quot;:2,&quot;color&quot;:8,&quot;term&quot;:0,&quot;trait&quot;:0,&quot;legacy&quot;:2,&quot;orderTable&quot;:130,&quot;orderDeck&quot;:300}," calcext:value-type="string">
            <text:p>{"id":"Y-11","name":"ネハン","kana":"ねはん","traitText":null,"ruleText":"戦場の寝ているカード1つを指定して発動できる。そのカードを山札の下に戻す。","legacyText":"冥府発動","imageUrl":"https://one-draw.jp/ijinden/cardlist/Y01/card/02_Y_011.png","expansion":20,"rarity":1,"type":3,"level":2,"color":8,"term":0,"trait":0,"legacy":2,"orderTable":130,"orderDeck":300},</text:p>
          </table:table-cell>
          <table:table-cell table:number-columns-repeated="16347"/>
        </table:table-row>
        <table:table-row table:style-name="ro2">
          <table:table-cell office:value-type="float" office:value="131" calcext:value-type="float">
            <text:p>131</text:p>
          </table:table-cell>
          <table:table-cell office:value-type="float" office:value="285" calcext:value-type="float">
            <text:p>285</text:p>
          </table:table-cell>
          <table:table-cell office:value-type="string" calcext:value-type="string">
            <text:p>Y-12</text:p>
          </table:table-cell>
          <table:table-cell office:value-type="float" office:value="12" calcext:value-type="float">
            <text:p>12</text:p>
          </table:table-cell>
          <table:table-cell office:value-type="string" calcext:value-type="string">
            <text:p>レクイエム</text:p>
          </table:table-cell>
          <table:table-cell office:value-type="string" calcext:value-type="string">
            <text:p>れくいえむ</text:p>
          </table:table-cell>
          <table:table-cell office:value-type="string" calcext:value-type="string">
            <text:p>三国の英傑デッキ</text:p>
          </table:table-cell>
          <table:table-cell table:formula="of:=VLOOKUP([.G132];[$収録番号.$A$1:$収録番号.$B$9];2;0)" office:value-type="float" office:value="20" calcext:value-type="float">
            <text:p>20</text:p>
          </table:table-cell>
          <table:table-cell office:value-type="string" calcext:value-type="string">
            <text:p>N</text:p>
          </table:table-cell>
          <table:table-cell table:formula="of:=VLOOKUP([.I132];[$レアリティ番号.$A$1:$レアリティ番号.$B$4];2;0)" office:value-type="float" office:value="1" calcext:value-type="float">
            <text:p>1</text:p>
          </table:table-cell>
          <table:table-cell office:value-type="string" calcext:value-type="string">
            <text:p>マホウ</text:p>
          </table:table-cell>
          <table:table-cell table:formula="of:=VLOOKUP([.K132];[$種類番号.$A$1:$種類番号.$B$4];2;0)" office:value-type="float" office:value="3" calcext:value-type="float">
            <text:p>3</text:p>
          </table:table-cell>
          <table:table-cell office:value-type="string" calcext:value-type="string">
            <text:p>黄</text:p>
          </table:table-cell>
          <table:table-cell table:formula="of:=VLOOKUP([.M132];[$色番号.$A$1:$色番号.$B$10];2;0)" office:value-type="float" office:value="8" calcext:value-type="float">
            <text:p>8</text:p>
          </table:table-cell>
          <table:table-cell table:number-columns-repeated="2" office:value-type="float" office:value="1" calcext:value-type="float">
            <text:p>1</text:p>
          </table:table-cell>
          <table:table-cell table:formula="of:=NA()" office:value-type="string" office:string-value="" calcext:value-type="error">
            <text:p>#N/A</text:p>
          </table:table-cell>
          <table:table-cell table:formula="of:=IFERROR(VLOOKUP([.$Q13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32];[$特性番号.$A$1:$特性番号.$B$8];2;0);0)" office:value-type="float" office:value="0" calcext:value-type="float">
            <text:p>0</text:p>
          </table:table-cell>
          <table:table-cell office:value-type="string" calcext:value-type="string">
            <text:p>墓地のマリョクでないカード4つを指定して発動できる。それらのカードすべてを山札の下に戻して、1ドローする。</text:p>
          </table:table-cell>
          <table:table-cell table:style-name="ce8" office:value-type="string" calcext:value-type="string">
            <text:p>手札に戻す</text:p>
          </table:table-cell>
          <table:table-cell table:formula="of:=IFERROR(VLOOKUP([.$V132];[$遺業能力番号.$A$1:$遺業能力番号.$B$9];2;0);0)" office:value-type="float" office:value="5" calcext:value-type="float">
            <text:p>5</text:p>
          </table:table-cell>
          <table:table-cell office:value-type="string" calcext:value-type="string">
            <text:p>https://one-draw.jp/ijinden/cardlist/Y01/card/02_Y_012.png</text:p>
          </table:table-cell>
          <table:table-cell table:formula="of:=CONCATENATE([$JSON.$A$1];[.$C132];[$JSON.$B$1];[.$E132];[$JSON.$C$1];[.$F132];[$JSON.$D$1];IF(ISNA([.$S132]);&quot;null&quot;;&quot;&quot;&quot;&quot;&amp;[.$S132]&amp;&quot;&quot;&quot;&quot;);[$JSON.$E$1];[.$U132];[$JSON.$F$1];IF(ISNA([.$V132]);&quot;null&quot;;&quot;&quot;&quot;&quot;&amp;[.$V132]&amp;&quot;&quot;&quot;&quot;);[$JSON.$G$1];[.$X132];[$JSON.$H$1];[.$H132];[$JSON.$I$1];[.J132];[$JSON.$J$1];[.$L132];[$JSON.$K$1];[.$O132];[$JSON.$L$1];[.$N132];[$JSON.$M$1];[.$R132];[$JSON.$N$1];[.$T132];[$JSON.$O$1];[.$W132];[$JSON.$P$1];[.$A132];[$JSON.$Q$1];[.$B132];[$JSON.$R$1])" office:value-type="string" office:string-value="{&quot;id&quot;:&quot;Y-12&quot;,&quot;name&quot;:&quot;レクイエム&quot;,&quot;kana&quot;:&quot;れくいえむ&quot;,&quot;traitText&quot;:null,&quot;ruleText&quot;:&quot;墓地のマリョクでないカード4つを指定して発動できる。それらのカードすべてを山札の下に戻して、1ドローする。&quot;,&quot;legacyText&quot;:&quot;手札に戻す&quot;,&quot;imageUrl&quot;:&quot;https://one-draw.jp/ijinden/cardlist/Y01/card/02_Y_012.png&quot;,&quot;expansion&quot;:20,&quot;rarity&quot;:1,&quot;type&quot;:3,&quot;level&quot;:1,&quot;color&quot;:8,&quot;term&quot;:0,&quot;trait&quot;:0,&quot;legacy&quot;:5,&quot;orderTable&quot;:131,&quot;orderDeck&quot;:285}," calcext:value-type="string">
            <text:p>{"id":"Y-12","name":"レクイエム","kana":"れくいえむ","traitText":null,"ruleText":"墓地のマリョクでないカード4つを指定して発動できる。それらのカードすべてを山札の下に戻して、1ドローする。","legacyText":"手札に戻す","imageUrl":"https://one-draw.jp/ijinden/cardlist/Y01/card/02_Y_012.png","expansion":20,"rarity":1,"type":3,"level":1,"color":8,"term":0,"trait":0,"legacy":5,"orderTable":131,"orderDeck":285},</text:p>
          </table:table-cell>
          <table:table-cell table:number-columns-repeated="16347"/>
        </table:table-row>
        <table:table-row table:style-name="ro2">
          <table:table-cell office:value-type="float" office:value="132" calcext:value-type="float">
            <text:p>132</text:p>
          </table:table-cell>
          <table:table-cell office:value-type="float" office:value="361" calcext:value-type="float">
            <text:p>361</text:p>
          </table:table-cell>
          <table:table-cell office:value-type="string" calcext:value-type="string">
            <text:p>Y-13</text:p>
          </table:table-cell>
          <table:table-cell office:value-type="float" office:value="13" calcext:value-type="float">
            <text:p>13</text:p>
          </table:table-cell>
          <table:table-cell office:value-type="string" calcext:value-type="string">
            <text:p>イエローストーン</text:p>
          </table:table-cell>
          <table:table-cell office:value-type="string" calcext:value-type="string">
            <text:p>いえろーすとーん</text:p>
          </table:table-cell>
          <table:table-cell office:value-type="string" calcext:value-type="string">
            <text:p>三国の英傑デッキ</text:p>
          </table:table-cell>
          <table:table-cell table:formula="of:=VLOOKUP([.G133];[$収録番号.$A$1:$収録番号.$B$9];2;0)" office:value-type="float" office:value="20" calcext:value-type="float">
            <text:p>20</text:p>
          </table:table-cell>
          <table:table-cell office:value-type="string" calcext:value-type="string">
            <text:p>N</text:p>
          </table:table-cell>
          <table:table-cell table:formula="of:=VLOOKUP([.I133];[$レアリティ番号.$A$1:$レアリティ番号.$B$4];2;0)" office:value-type="float" office:value="1" calcext:value-type="float">
            <text:p>1</text:p>
          </table:table-cell>
          <table:table-cell office:value-type="string" calcext:value-type="string">
            <text:p>マリョク</text:p>
          </table:table-cell>
          <table:table-cell table:formula="of:=VLOOKUP([.K133];[$種類番号.$A$1:$種類番号.$B$4];2;0)" office:value-type="float" office:value="4" calcext:value-type="float">
            <text:p>4</text:p>
          </table:table-cell>
          <table:table-cell office:value-type="string" calcext:value-type="string">
            <text:p>黄</text:p>
          </table:table-cell>
          <table:table-cell table:formula="of:=VLOOKUP([.M133];[$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3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33];[$特性番号.$A$1:$特性番号.$B$8];2;0);0)" office:value-type="float" office:value="0" calcext:value-type="float">
            <text:p>0</text:p>
          </table:table-cell>
          <table:table-cell office:value-type="string" calcext:value-type="string">
            <text:p>※デッキに何枚でも入れてよい。</text:p>
          </table:table-cell>
          <table:table-cell table:style-name="ce8" office:value-type="string" calcext:value-type="string">
            <text:p>復元</text:p>
          </table:table-cell>
          <table:table-cell table:formula="of:=IFERROR(VLOOKUP([.$V133];[$遺業能力番号.$A$1:$遺業能力番号.$B$9];2;0);0)" office:value-type="float" office:value="3" calcext:value-type="float">
            <text:p>3</text:p>
          </table:table-cell>
          <table:table-cell office:value-type="string" calcext:value-type="string">
            <text:p>https://one-draw.jp/ijinden/cardlist/Y01/card/02_Y_013.png</text:p>
          </table:table-cell>
          <table:table-cell table:formula="of:=CONCATENATE([$JSON.$A$1];[.$C133];[$JSON.$B$1];[.$E133];[$JSON.$C$1];[.$F133];[$JSON.$D$1];IF(ISNA([.$S133]);&quot;null&quot;;&quot;&quot;&quot;&quot;&amp;[.$S133]&amp;&quot;&quot;&quot;&quot;);[$JSON.$E$1];[.$U133];[$JSON.$F$1];IF(ISNA([.$V133]);&quot;null&quot;;&quot;&quot;&quot;&quot;&amp;[.$V133]&amp;&quot;&quot;&quot;&quot;);[$JSON.$G$1];[.$X133];[$JSON.$H$1];[.$H133];[$JSON.$I$1];[.J133];[$JSON.$J$1];[.$L133];[$JSON.$K$1];[.$O133];[$JSON.$L$1];[.$N133];[$JSON.$M$1];[.$R133];[$JSON.$N$1];[.$T133];[$JSON.$O$1];[.$W133];[$JSON.$P$1];[.$A133];[$JSON.$Q$1];[.$B133];[$JSON.$R$1])" office:value-type="string" office:string-value="{&quot;id&quot;:&quot;Y-13&quot;,&quot;name&quot;:&quot;イエローストーン&quot;,&quot;kana&quot;:&quot;いえろーすとーん&quot;,&quot;traitText&quot;:null,&quot;ruleText&quot;:&quot;※デッキに何枚でも入れてよい。&quot;,&quot;legacyText&quot;:&quot;復元&quot;,&quot;imageUrl&quot;:&quot;https://one-draw.jp/ijinden/cardlist/Y01/card/02_Y_013.png&quot;,&quot;expansion&quot;:20,&quot;rarity&quot;:1,&quot;type&quot;:4,&quot;level&quot;:1,&quot;color&quot;:8,&quot;term&quot;:0,&quot;trait&quot;:0,&quot;legacy&quot;:3,&quot;orderTable&quot;:132,&quot;orderDeck&quot;:361}," calcext:value-type="string">
            <text:p>{"id":"Y-13","name":"イエローストーン","kana":"いえろーすとーん","traitText":null,"ruleText":"※デッキに何枚でも入れてよい。","legacyText":"復元","imageUrl":"https://one-draw.jp/ijinden/cardlist/Y01/card/02_Y_013.png","expansion":20,"rarity":1,"type":4,"level":1,"color":8,"term":0,"trait":0,"legacy":3,"orderTable":132,"orderDeck":361},</text:p>
          </table:table-cell>
          <table:table-cell table:number-columns-repeated="16347"/>
        </table:table-row>
        <table:table-row table:style-name="ro2">
          <table:table-cell office:value-type="float" office:value="133" calcext:value-type="float">
            <text:p>133</text:p>
          </table:table-cell>
          <table:table-cell office:value-type="float" office:value="69" calcext:value-type="float">
            <text:p>69</text:p>
          </table:table-cell>
          <table:table-cell office:value-type="string" calcext:value-type="string">
            <text:p>2-1</text:p>
          </table:table-cell>
          <table:table-cell office:value-type="float" office:value="1" calcext:value-type="float">
            <text:p>1</text:p>
          </table:table-cell>
          <table:table-cell office:value-type="string" calcext:value-type="string">
            <text:p>天草四郎</text:p>
          </table:table-cell>
          <table:table-cell office:value-type="string" calcext:value-type="string">
            <text:p>あまくさしろう</text:p>
          </table:table-cell>
          <table:table-cell office:value-type="string" calcext:value-type="string">
            <text:p>第２弾ブースターパック</text:p>
          </table:table-cell>
          <table:table-cell table:formula="of:=VLOOKUP([.G134];[$収録番号.$A$1:$収録番号.$B$9];2;0)" office:value-type="float" office:value="25" calcext:value-type="float">
            <text:p>25</text:p>
          </table:table-cell>
          <table:table-cell office:value-type="string" calcext:value-type="string">
            <text:p>SR</text:p>
          </table:table-cell>
          <table:table-cell table:formula="of:=VLOOKUP([.I134];[$レアリティ番号.$A$1:$レアリティ番号.$B$4];2;0)" office:value-type="float" office:value="4" calcext:value-type="float">
            <text:p>4</text:p>
          </table:table-cell>
          <table:table-cell office:value-type="string" calcext:value-type="string">
            <text:p>イジン</text:p>
          </table:table-cell>
          <table:table-cell table:formula="of:=VLOOKUP([.K134];[$種類番号.$A$1:$種類番号.$B$4];2;0)" office:value-type="float" office:value="1" calcext:value-type="float">
            <text:p>1</text:p>
          </table:table-cell>
          <table:table-cell office:value-type="string" calcext:value-type="string">
            <text:p>赤</text:p>
          </table:table-cell>
          <table:table-cell table:formula="of:=VLOOKUP([.M134];[$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決起</text:p>
          </table:table-cell>
          <table:table-cell table:formula="of:=IFERROR(VLOOKUP([.$Q134];[$能力語番号.$A$1:$能力語番号.$B$10];2;0);0)" office:value-type="float" office:value="4" calcext:value-type="float">
            <text:p>4</text:p>
          </table:table-cell>
          <table:table-cell office:value-type="string" calcext:value-type="string">
            <text:p>剣術</text:p>
          </table:table-cell>
          <table:table-cell table:formula="of:=IFERROR(VLOOKUP([.$S134];[$特性番号.$A$1:$特性番号.$B$8];2;0);0)" office:value-type="float" office:value="1" calcext:value-type="float">
            <text:p>1</text:p>
          </table:table-cell>
          <table:table-cell office:value-type="string" calcext:value-type="string">
            <text:p>決起 - マリョク配置によってカードが自分の魔力ゾーンに置かれたとき、自分の魔力ゾーンのマリョクが4つ以上なら発動できる。1ドローして、このターンのマホウ使用に際し、手札のマホウは「魔力コスト0」になる。</text:p>
          </table:table-cell>
          <table:table-cell table:style-name="ce8" office:value-type="string" calcext:value-type="string">
            <text:p>反魂</text:p>
          </table:table-cell>
          <table:table-cell table:formula="of:=IFERROR(VLOOKUP([.$V134];[$遺業能力番号.$A$1:$遺業能力番号.$B$9];2;0);0)" office:value-type="float" office:value="6" calcext:value-type="float">
            <text:p>6</text:p>
          </table:table-cell>
          <table:table-cell office:value-type="string" calcext:value-type="string">
            <text:p>https://one-draw.jp/ijinden/cardlist/002/card/02_001.png</text:p>
          </table:table-cell>
          <table:table-cell table:formula="of:=CONCATENATE([$JSON.$A$1];[.$C134];[$JSON.$B$1];[.$E134];[$JSON.$C$1];[.$F134];[$JSON.$D$1];IF(ISNA([.$S134]);&quot;null&quot;;&quot;&quot;&quot;&quot;&amp;[.$S134]&amp;&quot;&quot;&quot;&quot;);[$JSON.$E$1];[.$U134];[$JSON.$F$1];IF(ISNA([.$V134]);&quot;null&quot;;&quot;&quot;&quot;&quot;&amp;[.$V134]&amp;&quot;&quot;&quot;&quot;);[$JSON.$G$1];[.$X134];[$JSON.$H$1];[.$H134];[$JSON.$I$1];[.J134];[$JSON.$J$1];[.$L134];[$JSON.$K$1];[.$O134];[$JSON.$L$1];[.$N134];[$JSON.$M$1];[.$R134];[$JSON.$N$1];[.$T134];[$JSON.$O$1];[.$W134];[$JSON.$P$1];[.$A134];[$JSON.$Q$1];[.$B134];[$JSON.$R$1])" office:value-type="string" office:string-value="{&quot;id&quot;:&quot;2-1&quot;,&quot;name&quot;:&quot;天草四郎&quot;,&quot;kana&quot;:&quot;あまくさしろう&quot;,&quot;traitText&quot;:&quot;剣術&quot;,&quot;ruleText&quot;:&quot;決起 - マリョク配置によってカードが自分の魔力ゾーンに置かれたとき、自分の魔力ゾーンのマリョクが4つ以上なら発動できる。1ドローして、このターンのマホウ使用に際し、手札のマホウは「魔力コスト0」になる。&quot;,&quot;legacyText&quot;:&quot;反魂&quot;,&quot;imageUrl&quot;:&quot;https://one-draw.jp/ijinden/cardlist/002/card/02_001.png&quot;,&quot;expansion&quot;:25,&quot;rarity&quot;:4,&quot;type&quot;:1,&quot;level&quot;:3,&quot;color&quot;:1,&quot;term&quot;:4,&quot;trait&quot;:1,&quot;legacy&quot;:6,&quot;orderTable&quot;:133,&quot;orderDeck&quot;:69}," calcext:value-type="string">
            <text:p>{"id":"2-1","name":"天草四郎","kana":"あまくさしろう","traitText":"剣術","ruleText":"決起 - マリョク配置によってカードが自分の魔力ゾーンに置かれたとき、自分の魔力ゾーンのマリョクが4つ以上なら発動できる。1ドローして、このターンのマホウ使用に際し、手札のマホウは「魔力コスト0」になる。","legacyText":"反魂","imageUrl":"https://one-draw.jp/ijinden/cardlist/002/card/02_001.png","expansion":25,"rarity":4,"type":1,"level":3,"color":1,"term":4,"trait":1,"legacy":6,"orderTable":133,"orderDeck":69},</text:p>
          </table:table-cell>
          <table:table-cell table:number-columns-repeated="16347"/>
        </table:table-row>
        <table:table-row table:style-name="ro2">
          <table:table-cell office:value-type="float" office:value="134" calcext:value-type="float">
            <text:p>134</text:p>
          </table:table-cell>
          <table:table-cell office:value-type="float" office:value="158" calcext:value-type="float">
            <text:p>158</text:p>
          </table:table-cell>
          <table:table-cell office:value-type="string" calcext:value-type="string">
            <text:p>2-2</text:p>
          </table:table-cell>
          <table:table-cell office:value-type="float" office:value="2" calcext:value-type="float">
            <text:p>2</text:p>
          </table:table-cell>
          <table:table-cell office:value-type="string" calcext:value-type="string">
            <text:p>ピョートル大帝</text:p>
          </table:table-cell>
          <table:table-cell office:value-type="string" calcext:value-type="string">
            <text:p>ぴょーとるたいてい</text:p>
          </table:table-cell>
          <table:table-cell office:value-type="string" calcext:value-type="string">
            <text:p>第２弾ブースターパック</text:p>
          </table:table-cell>
          <table:table-cell table:formula="of:=VLOOKUP([.G135];[$収録番号.$A$1:$収録番号.$B$9];2;0)" office:value-type="float" office:value="25" calcext:value-type="float">
            <text:p>25</text:p>
          </table:table-cell>
          <table:table-cell office:value-type="string" calcext:value-type="string">
            <text:p>SR</text:p>
          </table:table-cell>
          <table:table-cell table:formula="of:=VLOOKUP([.I135];[$レアリティ番号.$A$1:$レアリティ番号.$B$4];2;0)" office:value-type="float" office:value="4" calcext:value-type="float">
            <text:p>4</text:p>
          </table:table-cell>
          <table:table-cell office:value-type="string" calcext:value-type="string">
            <text:p>イジン</text:p>
          </table:table-cell>
          <table:table-cell table:formula="of:=VLOOKUP([.K135];[$種類番号.$A$1:$種類番号.$B$4];2;0)" office:value-type="float" office:value="1" calcext:value-type="float">
            <text:p>1</text:p>
          </table:table-cell>
          <table:table-cell office:value-type="string" calcext:value-type="string">
            <text:p>青</text:p>
          </table:table-cell>
          <table:table-cell table:formula="of:=VLOOKUP([.M135];[$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徴募</text:p>
          </table:table-cell>
          <table:table-cell table:formula="of:=IFERROR(VLOOKUP([.$Q135];[$能力語番号.$A$1:$能力語番号.$B$10];2;0);0)" office:value-type="float" office:value="8" calcext:value-type="float">
            <text:p>8</text:p>
          </table:table-cell>
          <table:table-cell table:formula="of:=NA()" office:value-type="string" office:string-value="" calcext:value-type="error">
            <text:p>#N/A</text:p>
          </table:table-cell>
          <table:table-cell table:formula="of:=IFERROR(VLOOKUP([.$S135];[$特性番号.$A$1:$特性番号.$B$8];2;0);0)" office:value-type="float" office:value="0" calcext:value-type="float">
            <text:p>0</text:p>
          </table:table-cell>
          <table:table-cell office:value-type="string" calcext:value-type="string">
            <text:p>ダブルプレッシャー¶「航海」を持つイジンが自分の戦場にいる間「パワー+3000」を得る。¶徴募 - この能力は墓地でも発動する。自分のエンドフェイズが開始したとき、このターンにアタッカーが破壊されているなら、自分の手札か自分の墓地のレベル5以下のイジン1体を指定して発動できる。そのイジンを戦場に置く。</text:p>
          </table:table-cell>
          <table:table-cell table:style-name="ce8" table:formula="of:=NA()" office:value-type="string" office:string-value="" calcext:value-type="error">
            <text:p>#N/A</text:p>
          </table:table-cell>
          <table:table-cell table:formula="of:=IFERROR(VLOOKUP([.$V135];[$遺業能力番号.$A$1:$遺業能力番号.$B$9];2;0);0)" office:value-type="float" office:value="0" calcext:value-type="float">
            <text:p>0</text:p>
          </table:table-cell>
          <table:table-cell office:value-type="string" calcext:value-type="string">
            <text:p>https://one-draw.jp/ijinden/cardlist/002/card/02_002.png</text:p>
          </table:table-cell>
          <table:table-cell table:formula="of:=CONCATENATE([$JSON.$A$1];[.$C135];[$JSON.$B$1];[.$E135];[$JSON.$C$1];[.$F135];[$JSON.$D$1];IF(ISNA([.$S135]);&quot;null&quot;;&quot;&quot;&quot;&quot;&amp;[.$S135]&amp;&quot;&quot;&quot;&quot;);[$JSON.$E$1];[.$U135];[$JSON.$F$1];IF(ISNA([.$V135]);&quot;null&quot;;&quot;&quot;&quot;&quot;&amp;[.$V135]&amp;&quot;&quot;&quot;&quot;);[$JSON.$G$1];[.$X135];[$JSON.$H$1];[.$H135];[$JSON.$I$1];[.J135];[$JSON.$J$1];[.$L135];[$JSON.$K$1];[.$O135];[$JSON.$L$1];[.$N135];[$JSON.$M$1];[.$R135];[$JSON.$N$1];[.$T135];[$JSON.$O$1];[.$W135];[$JSON.$P$1];[.$A135];[$JSON.$Q$1];[.$B135];[$JSON.$R$1])" office:value-type="string" office:string-value="{&quot;id&quot;:&quot;2-2&quot;,&quot;name&quot;:&quot;ピョートル大帝&quot;,&quot;kana&quot;:&quot;ぴょーとるたいてい&quot;,&quot;traitText&quot;:null,&quot;ruleText&quot;:&quot;ダブルプレッシャー¶「航海」を持つイジンが自分の戦場にいる間「パワー+3000」を得る。¶徴募 - この能力は墓地でも発動する。自分のエンドフェイズが開始したとき、このターンにアタッカーが破壊されているなら、自分の手札か自分の墓地のレベル5以下のイジン1体を指定して発動できる。そのイジンを戦場に置く。&quot;,&quot;legacyText&quot;:null,&quot;imageUrl&quot;:&quot;https://one-draw.jp/ijinden/cardlist/002/card/02_002.png&quot;,&quot;expansion&quot;:25,&quot;rarity&quot;:4,&quot;type&quot;:1,&quot;level&quot;:5,&quot;color&quot;:2,&quot;term&quot;:8,&quot;trait&quot;:0,&quot;legacy&quot;:0,&quot;orderTable&quot;:134,&quot;orderDeck&quot;:158}," calcext:value-type="string">
            <text:p>{"id":"2-2","name":"ピョートル大帝","kana":"ぴょーとるたいてい","traitText":null,"ruleText":"ダブルプレッシャー¶「航海」を持つイジンが自分の戦場にいる間「パワー+3000」を得る。¶徴募 - この能力は墓地でも発動する。自分のエンドフェイズが開始したとき、このターンにアタッカーが破壊されているなら、自分の手札か自分の墓地のレベル5以下のイジン1体を指定して発動できる。そのイジンを戦場に置く。","legacyText":null,"imageUrl":"https://one-draw.jp/ijinden/cardlist/002/card/02_002.png","expansion":25,"rarity":4,"type":1,"level":5,"color":2,"term":8,"trait":0,"legacy":0,"orderTable":134,"orderDeck":158},</text:p>
          </table:table-cell>
          <table:table-cell table:number-columns-repeated="16347"/>
        </table:table-row>
        <table:table-row table:style-name="ro2">
          <table:table-cell office:value-type="float" office:value="135" calcext:value-type="float">
            <text:p>135</text:p>
          </table:table-cell>
          <table:table-cell office:value-type="float" office:value="230" calcext:value-type="float">
            <text:p>230</text:p>
          </table:table-cell>
          <table:table-cell office:value-type="string" calcext:value-type="string">
            <text:p>2-3</text:p>
          </table:table-cell>
          <table:table-cell office:value-type="float" office:value="3" calcext:value-type="float">
            <text:p>3</text:p>
          </table:table-cell>
          <table:table-cell office:value-type="string" calcext:value-type="string">
            <text:p>エイブラハム・リンカン</text:p>
          </table:table-cell>
          <table:table-cell office:value-type="string" calcext:value-type="string">
            <text:p>えいぶらはむりんかん</text:p>
          </table:table-cell>
          <table:table-cell office:value-type="string" calcext:value-type="string">
            <text:p>第２弾ブースターパック</text:p>
          </table:table-cell>
          <table:table-cell table:formula="of:=VLOOKUP([.G136];[$収録番号.$A$1:$収録番号.$B$9];2;0)" office:value-type="float" office:value="25" calcext:value-type="float">
            <text:p>25</text:p>
          </table:table-cell>
          <table:table-cell office:value-type="string" calcext:value-type="string">
            <text:p>SR</text:p>
          </table:table-cell>
          <table:table-cell table:formula="of:=VLOOKUP([.I136];[$レアリティ番号.$A$1:$レアリティ番号.$B$4];2;0)" office:value-type="float" office:value="4" calcext:value-type="float">
            <text:p>4</text:p>
          </table:table-cell>
          <table:table-cell office:value-type="string" calcext:value-type="string">
            <text:p>イジン</text:p>
          </table:table-cell>
          <table:table-cell table:formula="of:=VLOOKUP([.K136];[$種類番号.$A$1:$種類番号.$B$4];2;0)" office:value-type="float" office:value="1" calcext:value-type="float">
            <text:p>1</text:p>
          </table:table-cell>
          <table:table-cell office:value-type="string" calcext:value-type="string">
            <text:p>緑</text:p>
          </table:table-cell>
          <table:table-cell table:formula="of:=VLOOKUP([.M136];[$色番号.$A$1:$色番号.$B$10];2;0)" office:value-type="float" office:value="4" calcext:value-type="float">
            <text:p>4</text:p>
          </table:table-cell>
          <table:table-cell office:value-type="float" office:value="9" calcext:value-type="float">
            <text:p>9</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3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36];[$特性番号.$A$1:$特性番号.$B$8];2;0);0)" office:value-type="float" office:value="0" calcext:value-type="float">
            <text:p>0</text:p>
          </table:table-cell>
          <table:table-cell office:value-type="string" calcext:value-type="string">
            <text:p>「即応」を得ることができない。¶戦場に置かれたとき、戦場のガーディアンすべてを手札に戻す。¶相手のターンの間、墓地のカードは能力すべてを失う。この能力は、能力によって失われない。</text:p>
          </table:table-cell>
          <table:table-cell table:style-name="ce8" office:value-type="string" calcext:value-type="string">
            <text:p>魔力化</text:p>
          </table:table-cell>
          <table:table-cell table:formula="of:=IFERROR(VLOOKUP([.$V136];[$遺業能力番号.$A$1:$遺業能力番号.$B$9];2;0);0)" office:value-type="float" office:value="1" calcext:value-type="float">
            <text:p>1</text:p>
          </table:table-cell>
          <table:table-cell office:value-type="string" calcext:value-type="string">
            <text:p>https://one-draw.jp/ijinden/cardlist/002/card/02_003.png</text:p>
          </table:table-cell>
          <table:table-cell table:formula="of:=CONCATENATE([$JSON.$A$1];[.$C136];[$JSON.$B$1];[.$E136];[$JSON.$C$1];[.$F136];[$JSON.$D$1];IF(ISNA([.$S136]);&quot;null&quot;;&quot;&quot;&quot;&quot;&amp;[.$S136]&amp;&quot;&quot;&quot;&quot;);[$JSON.$E$1];[.$U136];[$JSON.$F$1];IF(ISNA([.$V136]);&quot;null&quot;;&quot;&quot;&quot;&quot;&amp;[.$V136]&amp;&quot;&quot;&quot;&quot;);[$JSON.$G$1];[.$X136];[$JSON.$H$1];[.$H136];[$JSON.$I$1];[.J136];[$JSON.$J$1];[.$L136];[$JSON.$K$1];[.$O136];[$JSON.$L$1];[.$N136];[$JSON.$M$1];[.$R136];[$JSON.$N$1];[.$T136];[$JSON.$O$1];[.$W136];[$JSON.$P$1];[.$A136];[$JSON.$Q$1];[.$B136];[$JSON.$R$1])" office:value-type="string" office:string-value="{&quot;id&quot;:&quot;2-3&quot;,&quot;name&quot;:&quot;エイブラハム・リンカン&quot;,&quot;kana&quot;:&quot;えいぶらはむりんかん&quot;,&quot;traitText&quot;:null,&quot;ruleText&quot;:&quot;「即応」を得ることができない。¶戦場に置かれたとき、戦場のガーディアンすべてを手札に戻す。¶相手のターンの間、墓地のカードは能力すべてを失う。この能力は、能力によって失われない。&quot;,&quot;legacyText&quot;:&quot;魔力化&quot;,&quot;imageUrl&quot;:&quot;https://one-draw.jp/ijinden/cardlist/002/card/02_003.png&quot;,&quot;expansion&quot;:25,&quot;rarity&quot;:4,&quot;type&quot;:1,&quot;level&quot;:9,&quot;color&quot;:4,&quot;term&quot;:0,&quot;trait&quot;:0,&quot;legacy&quot;:1,&quot;orderTable&quot;:135,&quot;orderDeck&quot;:230}," calcext:value-type="string">
            <text:p>{"id":"2-3","name":"エイブラハム・リンカン","kana":"えいぶらはむりんかん","traitText":null,"ruleText":"「即応」を得ることができない。¶戦場に置かれたとき、戦場のガーディアンすべてを手札に戻す。¶相手のターンの間、墓地のカードは能力すべてを失う。この能力は、能力によって失われない。","legacyText":"魔力化","imageUrl":"https://one-draw.jp/ijinden/cardlist/002/card/02_003.png","expansion":25,"rarity":4,"type":1,"level":9,"color":4,"term":0,"trait":0,"legacy":1,"orderTable":135,"orderDeck":230},</text:p>
          </table:table-cell>
          <table:table-cell table:number-columns-repeated="16347"/>
        </table:table-row>
        <table:table-row table:style-name="ro2">
          <table:table-cell office:value-type="float" office:value="136" calcext:value-type="float">
            <text:p>136</text:p>
          </table:table-cell>
          <table:table-cell office:value-type="float" office:value="224" calcext:value-type="float">
            <text:p>224</text:p>
          </table:table-cell>
          <table:table-cell office:value-type="string" calcext:value-type="string">
            <text:p>2-4</text:p>
          </table:table-cell>
          <table:table-cell office:value-type="float" office:value="4" calcext:value-type="float">
            <text:p>4</text:p>
          </table:table-cell>
          <table:table-cell office:value-type="string" calcext:value-type="string">
            <text:p>アイザック・ニュートン</text:p>
          </table:table-cell>
          <table:table-cell office:value-type="string" calcext:value-type="string">
            <text:p>あいざっくにゅーとん</text:p>
          </table:table-cell>
          <table:table-cell office:value-type="string" calcext:value-type="string">
            <text:p>第２弾ブースターパック</text:p>
          </table:table-cell>
          <table:table-cell table:formula="of:=VLOOKUP([.G137];[$収録番号.$A$1:$収録番号.$B$9];2;0)" office:value-type="float" office:value="25" calcext:value-type="float">
            <text:p>25</text:p>
          </table:table-cell>
          <table:table-cell office:value-type="string" calcext:value-type="string">
            <text:p>SR</text:p>
          </table:table-cell>
          <table:table-cell table:formula="of:=VLOOKUP([.I137];[$レアリティ番号.$A$1:$レアリティ番号.$B$4];2;0)" office:value-type="float" office:value="4" calcext:value-type="float">
            <text:p>4</text:p>
          </table:table-cell>
          <table:table-cell office:value-type="string" calcext:value-type="string">
            <text:p>イジン</text:p>
          </table:table-cell>
          <table:table-cell table:formula="of:=VLOOKUP([.K137];[$種類番号.$A$1:$種類番号.$B$4];2;0)" office:value-type="float" office:value="1" calcext:value-type="float">
            <text:p>1</text:p>
          </table:table-cell>
          <table:table-cell office:value-type="string" calcext:value-type="string">
            <text:p>黄</text:p>
          </table:table-cell>
          <table:table-cell table:formula="of:=VLOOKUP([.M137];[$色番号.$A$1:$色番号.$B$10];2;0)" office:value-type="float" office:value="8" calcext:value-type="float">
            <text:p>8</text:p>
          </table:table-cell>
          <table:table-cell office:value-type="float" office:value="8" calcext:value-type="float">
            <text:p>8</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3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37];[$特性番号.$A$1:$特性番号.$B$8];2;0);0)" office:value-type="float" office:value="0" calcext:value-type="float">
            <text:p>0</text:p>
          </table:table-cell>
          <table:table-cell office:value-type="string" calcext:value-type="string">
            <text:p>自分のドローフェイズの間、自分は山札からカードを引くことができない。¶自分のドローフェイズが開始したとき、自分の手札が10枚以上なら発動する。ゲームに勝利する。¶自分のエンドフェイズが開始したとき、自分のイジン召喚権1つにつき1ドローする。</text:p>
          </table:table-cell>
          <table:table-cell table:style-name="ce8" office:value-type="string" calcext:value-type="string">
            <text:p>魔力化</text:p>
          </table:table-cell>
          <table:table-cell table:formula="of:=IFERROR(VLOOKUP([.$V137];[$遺業能力番号.$A$1:$遺業能力番号.$B$9];2;0);0)" office:value-type="float" office:value="1" calcext:value-type="float">
            <text:p>1</text:p>
          </table:table-cell>
          <table:table-cell office:value-type="string" calcext:value-type="string">
            <text:p>https://one-draw.jp/ijinden/cardlist/002/card/02_004.png</text:p>
          </table:table-cell>
          <table:table-cell table:formula="of:=CONCATENATE([$JSON.$A$1];[.$C137];[$JSON.$B$1];[.$E137];[$JSON.$C$1];[.$F137];[$JSON.$D$1];IF(ISNA([.$S137]);&quot;null&quot;;&quot;&quot;&quot;&quot;&amp;[.$S137]&amp;&quot;&quot;&quot;&quot;);[$JSON.$E$1];[.$U137];[$JSON.$F$1];IF(ISNA([.$V137]);&quot;null&quot;;&quot;&quot;&quot;&quot;&amp;[.$V137]&amp;&quot;&quot;&quot;&quot;);[$JSON.$G$1];[.$X137];[$JSON.$H$1];[.$H137];[$JSON.$I$1];[.J137];[$JSON.$J$1];[.$L137];[$JSON.$K$1];[.$O137];[$JSON.$L$1];[.$N137];[$JSON.$M$1];[.$R137];[$JSON.$N$1];[.$T137];[$JSON.$O$1];[.$W137];[$JSON.$P$1];[.$A137];[$JSON.$Q$1];[.$B137];[$JSON.$R$1])" office:value-type="string" office:string-value="{&quot;id&quot;:&quot;2-4&quot;,&quot;name&quot;:&quot;アイザック・ニュートン&quot;,&quot;kana&quot;:&quot;あいざっくにゅーとん&quot;,&quot;traitText&quot;:null,&quot;ruleText&quot;:&quot;自分のドローフェイズの間、自分は山札からカードを引くことができない。¶自分のドローフェイズが開始したとき、自分の手札が10枚以上なら発動する。ゲームに勝利する。¶自分のエンドフェイズが開始したとき、自分のイジン召喚権1つにつき1ドローする。&quot;,&quot;legacyText&quot;:&quot;魔力化&quot;,&quot;imageUrl&quot;:&quot;https://one-draw.jp/ijinden/cardlist/002/card/02_004.png&quot;,&quot;expansion&quot;:25,&quot;rarity&quot;:4,&quot;type&quot;:1,&quot;level&quot;:8,&quot;color&quot;:8,&quot;term&quot;:0,&quot;trait&quot;:0,&quot;legacy&quot;:1,&quot;orderTable&quot;:136,&quot;orderDeck&quot;:224}," calcext:value-type="string">
            <text:p>{"id":"2-4","name":"アイザック・ニュートン","kana":"あいざっくにゅーとん","traitText":null,"ruleText":"自分のドローフェイズの間、自分は山札からカードを引くことができない。¶自分のドローフェイズが開始したとき、自分の手札が10枚以上なら発動する。ゲームに勝利する。¶自分のエンドフェイズが開始したとき、自分のイジン召喚権1つにつき1ドローする。","legacyText":"魔力化","imageUrl":"https://one-draw.jp/ijinden/cardlist/002/card/02_004.png","expansion":25,"rarity":4,"type":1,"level":8,"color":8,"term":0,"trait":0,"legacy":1,"orderTable":136,"orderDeck":224},</text:p>
          </table:table-cell>
          <table:table-cell table:number-columns-repeated="16347"/>
        </table:table-row>
        <table:table-row table:style-name="ro2">
          <table:table-cell office:value-type="float" office:value="137" calcext:value-type="float">
            <text:p>137</text:p>
          </table:table-cell>
          <table:table-cell office:value-type="float" office:value="133" calcext:value-type="float">
            <text:p>133</text:p>
          </table:table-cell>
          <table:table-cell office:value-type="string" calcext:value-type="string">
            <text:p>2-5</text:p>
          </table:table-cell>
          <table:table-cell office:value-type="float" office:value="5" calcext:value-type="float">
            <text:p>5</text:p>
          </table:table-cell>
          <table:table-cell office:value-type="string" calcext:value-type="string">
            <text:p>親鸞</text:p>
          </table:table-cell>
          <table:table-cell office:value-type="string" calcext:value-type="string">
            <text:p>しんらん</text:p>
          </table:table-cell>
          <table:table-cell office:value-type="string" calcext:value-type="string">
            <text:p>第２弾ブースターパック</text:p>
          </table:table-cell>
          <table:table-cell table:formula="of:=VLOOKUP([.G138];[$収録番号.$A$1:$収録番号.$B$9];2;0)" office:value-type="float" office:value="25" calcext:value-type="float">
            <text:p>25</text:p>
          </table:table-cell>
          <table:table-cell office:value-type="string" calcext:value-type="string">
            <text:p>SR</text:p>
          </table:table-cell>
          <table:table-cell table:formula="of:=VLOOKUP([.I138];[$レアリティ番号.$A$1:$レアリティ番号.$B$4];2;0)" office:value-type="float" office:value="4" calcext:value-type="float">
            <text:p>4</text:p>
          </table:table-cell>
          <table:table-cell office:value-type="string" calcext:value-type="string">
            <text:p>イジン</text:p>
          </table:table-cell>
          <table:table-cell table:formula="of:=VLOOKUP([.K138];[$種類番号.$A$1:$種類番号.$B$4];2;0)" office:value-type="float" office:value="1" calcext:value-type="float">
            <text:p>1</text:p>
          </table:table-cell>
          <table:table-cell office:value-type="string" calcext:value-type="string">
            <text:p>黄</text:p>
          </table:table-cell>
          <table:table-cell table:formula="of:=VLOOKUP([.M138];[$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3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38];[$特性番号.$A$1:$特性番号.$B$8];2;0);0)" office:value-type="float" office:value="0" calcext:value-type="float">
            <text:p>0</text:p>
          </table:table-cell>
          <table:table-cell office:value-type="string" calcext:value-type="string">
            <text:p>カードが墓地に6つ以上ある間「破壊されない」を得る。¶自分のエンドフェイズが開始したとき、墓地のマリョクでないカード1つを指定して発動できる。そのカードを山札の下に戻す。¶カードが墓地から離れたときに発動できる。1ドローする。</text:p>
          </table:table-cell>
          <table:table-cell table:style-name="ce8" office:value-type="string" calcext:value-type="string">
            <text:p>山札の上か下に戻す</text:p>
          </table:table-cell>
          <table:table-cell table:formula="of:=IFERROR(VLOOKUP([.$V138];[$遺業能力番号.$A$1:$遺業能力番号.$B$9];2;0);0)" office:value-type="float" office:value="7" calcext:value-type="float">
            <text:p>7</text:p>
          </table:table-cell>
          <table:table-cell office:value-type="string" calcext:value-type="string">
            <text:p>https://one-draw.jp/ijinden/cardlist/002/card/02_005.png</text:p>
          </table:table-cell>
          <table:table-cell table:formula="of:=CONCATENATE([$JSON.$A$1];[.$C138];[$JSON.$B$1];[.$E138];[$JSON.$C$1];[.$F138];[$JSON.$D$1];IF(ISNA([.$S138]);&quot;null&quot;;&quot;&quot;&quot;&quot;&amp;[.$S138]&amp;&quot;&quot;&quot;&quot;);[$JSON.$E$1];[.$U138];[$JSON.$F$1];IF(ISNA([.$V138]);&quot;null&quot;;&quot;&quot;&quot;&quot;&amp;[.$V138]&amp;&quot;&quot;&quot;&quot;);[$JSON.$G$1];[.$X138];[$JSON.$H$1];[.$H138];[$JSON.$I$1];[.J138];[$JSON.$J$1];[.$L138];[$JSON.$K$1];[.$O138];[$JSON.$L$1];[.$N138];[$JSON.$M$1];[.$R138];[$JSON.$N$1];[.$T138];[$JSON.$O$1];[.$W138];[$JSON.$P$1];[.$A138];[$JSON.$Q$1];[.$B138];[$JSON.$R$1])" office:value-type="string" office:string-value="{&quot;id&quot;:&quot;2-5&quot;,&quot;name&quot;:&quot;親鸞&quot;,&quot;kana&quot;:&quot;しんらん&quot;,&quot;traitText&quot;:null,&quot;ruleText&quot;:&quot;カードが墓地に6つ以上ある間「破壊されない」を得る。¶自分のエンドフェイズが開始したとき、墓地のマリョクでないカード1つを指定して発動できる。そのカードを山札の下に戻す。¶カードが墓地から離れたときに発動できる。1ドローする。&quot;,&quot;legacyText&quot;:&quot;山札の上か下に戻す&quot;,&quot;imageUrl&quot;:&quot;https://one-draw.jp/ijinden/cardlist/002/card/02_005.png&quot;,&quot;expansion&quot;:25,&quot;rarity&quot;:4,&quot;type&quot;:1,&quot;level&quot;:4,&quot;color&quot;:8,&quot;term&quot;:0,&quot;trait&quot;:0,&quot;legacy&quot;:7,&quot;orderTable&quot;:137,&quot;orderDeck&quot;:133}," calcext:value-type="string">
            <text:p>{"id":"2-5","name":"親鸞","kana":"しんらん","traitText":null,"ruleText":"カードが墓地に6つ以上ある間「破壊されない」を得る。¶自分のエンドフェイズが開始したとき、墓地のマリョクでないカード1つを指定して発動できる。そのカードを山札の下に戻す。¶カードが墓地から離れたときに発動できる。1ドローする。","legacyText":"山札の上か下に戻す","imageUrl":"https://one-draw.jp/ijinden/cardlist/002/card/02_005.png","expansion":25,"rarity":4,"type":1,"level":4,"color":8,"term":0,"trait":0,"legacy":7,"orderTable":137,"orderDeck":133},</text:p>
          </table:table-cell>
          <table:table-cell table:number-columns-repeated="16347"/>
        </table:table-row>
        <table:table-row table:style-name="ro2">
          <table:table-cell office:value-type="float" office:value="138" calcext:value-type="float">
            <text:p>138</text:p>
          </table:table-cell>
          <table:table-cell office:value-type="float" office:value="214" calcext:value-type="float">
            <text:p>214</text:p>
          </table:table-cell>
          <table:table-cell office:value-type="string" calcext:value-type="string">
            <text:p>2-6</text:p>
          </table:table-cell>
          <table:table-cell office:value-type="float" office:value="6" calcext:value-type="float">
            <text:p>6</text:p>
          </table:table-cell>
          <table:table-cell office:value-type="string" calcext:value-type="string">
            <text:p>ナポレオン・ボナパルト</text:p>
          </table:table-cell>
          <table:table-cell office:value-type="string" calcext:value-type="string">
            <text:p>なぽれおんぼなぱると</text:p>
          </table:table-cell>
          <table:table-cell office:value-type="string" calcext:value-type="string">
            <text:p>第２弾ブースターパック</text:p>
          </table:table-cell>
          <table:table-cell table:formula="of:=VLOOKUP([.G139];[$収録番号.$A$1:$収録番号.$B$9];2;0)" office:value-type="float" office:value="25" calcext:value-type="float">
            <text:p>25</text:p>
          </table:table-cell>
          <table:table-cell office:value-type="string" calcext:value-type="string">
            <text:p>SR</text:p>
          </table:table-cell>
          <table:table-cell table:formula="of:=VLOOKUP([.I139];[$レアリティ番号.$A$1:$レアリティ番号.$B$4];2;0)" office:value-type="float" office:value="4" calcext:value-type="float">
            <text:p>4</text:p>
          </table:table-cell>
          <table:table-cell office:value-type="string" calcext:value-type="string">
            <text:p>イジン</text:p>
          </table:table-cell>
          <table:table-cell table:formula="of:=VLOOKUP([.K139];[$種類番号.$A$1:$種類番号.$B$4];2;0)" office:value-type="float" office:value="1" calcext:value-type="float">
            <text:p>1</text:p>
          </table:table-cell>
          <table:table-cell office:value-type="string" calcext:value-type="string">
            <text:p>黄</text:p>
          </table:table-cell>
          <table:table-cell table:formula="of:=VLOOKUP([.M139];[$色番号.$A$1:$色番号.$B$10];2;0)" office:value-type="float" office:value="8" calcext:value-type="float">
            <text:p>8</text:p>
          </table:table-cell>
          <table:table-cell office:value-type="float" office:value="7" calcext:value-type="float">
            <text:p>7</text:p>
          </table:table-cell>
          <table:table-cell table:formula="of:=NA()" office:value-type="string" office:string-value="" calcext:value-type="error">
            <text:p>#N/A</text:p>
          </table:table-cell>
          <table:table-cell office:value-type="string" calcext:value-type="string">
            <text:p>徴募</text:p>
          </table:table-cell>
          <table:table-cell table:formula="of:=IFERROR(VLOOKUP([.$Q139];[$能力語番号.$A$1:$能力語番号.$B$10];2;0);0)" office:value-type="float" office:value="8" calcext:value-type="float">
            <text:p>8</text:p>
          </table:table-cell>
          <table:table-cell table:formula="of:=NA()" office:value-type="string" office:string-value="" calcext:value-type="error">
            <text:p>#N/A</text:p>
          </table:table-cell>
          <table:table-cell table:formula="of:=IFERROR(VLOOKUP([.$S139];[$特性番号.$A$1:$特性番号.$B$8];2;0);0)" office:value-type="float" office:value="0" calcext:value-type="float">
            <text:p>0</text:p>
          </table:table-cell>
          <table:table-cell office:value-type="string" calcext:value-type="string">
            <text:p>ウォッチャー¶徴募 - この能力は墓地でも発動する。自分のエンドフェイズが開始したとき、このターンにアタッカーが破壊されているなら発動できる。これを戦場に置くか、自分の山札の上から1枚をガーディアンにして戦場に置く。</text:p>
          </table:table-cell>
          <table:table-cell table:style-name="ce8" table:formula="of:=NA()" office:value-type="string" office:string-value="" calcext:value-type="error">
            <text:p>#N/A</text:p>
          </table:table-cell>
          <table:table-cell table:formula="of:=IFERROR(VLOOKUP([.$V139];[$遺業能力番号.$A$1:$遺業能力番号.$B$9];2;0);0)" office:value-type="float" office:value="0" calcext:value-type="float">
            <text:p>0</text:p>
          </table:table-cell>
          <table:table-cell office:value-type="string" calcext:value-type="string">
            <text:p>https://one-draw.jp/ijinden/cardlist/002/card/02_006.png</text:p>
          </table:table-cell>
          <table:table-cell table:formula="of:=CONCATENATE([$JSON.$A$1];[.$C139];[$JSON.$B$1];[.$E139];[$JSON.$C$1];[.$F139];[$JSON.$D$1];IF(ISNA([.$S139]);&quot;null&quot;;&quot;&quot;&quot;&quot;&amp;[.$S139]&amp;&quot;&quot;&quot;&quot;);[$JSON.$E$1];[.$U139];[$JSON.$F$1];IF(ISNA([.$V139]);&quot;null&quot;;&quot;&quot;&quot;&quot;&amp;[.$V139]&amp;&quot;&quot;&quot;&quot;);[$JSON.$G$1];[.$X139];[$JSON.$H$1];[.$H139];[$JSON.$I$1];[.J139];[$JSON.$J$1];[.$L139];[$JSON.$K$1];[.$O139];[$JSON.$L$1];[.$N139];[$JSON.$M$1];[.$R139];[$JSON.$N$1];[.$T139];[$JSON.$O$1];[.$W139];[$JSON.$P$1];[.$A139];[$JSON.$Q$1];[.$B139];[$JSON.$R$1])" office:value-type="string" office:string-value="{&quot;id&quot;:&quot;2-6&quot;,&quot;name&quot;:&quot;ナポレオン・ボナパルト&quot;,&quot;kana&quot;:&quot;なぽれおんぼなぱると&quot;,&quot;traitText&quot;:null,&quot;ruleText&quot;:&quot;ウォッチャー¶徴募 - この能力は墓地でも発動する。自分のエンドフェイズが開始したとき、このターンにアタッカーが破壊されているなら発動できる。これを戦場に置くか、自分の山札の上から1枚をガーディアンにして戦場に置く。&quot;,&quot;legacyText&quot;:null,&quot;imageUrl&quot;:&quot;https://one-draw.jp/ijinden/cardlist/002/card/02_006.png&quot;,&quot;expansion&quot;:25,&quot;rarity&quot;:4,&quot;type&quot;:1,&quot;level&quot;:7,&quot;color&quot;:8,&quot;term&quot;:8,&quot;trait&quot;:0,&quot;legacy&quot;:0,&quot;orderTable&quot;:138,&quot;orderDeck&quot;:214}," calcext:value-type="string">
            <text:p>{"id":"2-6","name":"ナポレオン・ボナパルト","kana":"なぽれおんぼなぱると","traitText":null,"ruleText":"ウォッチャー¶徴募 - この能力は墓地でも発動する。自分のエンドフェイズが開始したとき、このターンにアタッカーが破壊されているなら発動できる。これを戦場に置くか、自分の山札の上から1枚をガーディアンにして戦場に置く。","legacyText":null,"imageUrl":"https://one-draw.jp/ijinden/cardlist/002/card/02_006.png","expansion":25,"rarity":4,"type":1,"level":7,"color":8,"term":8,"trait":0,"legacy":0,"orderTable":138,"orderDeck":214},</text:p>
          </table:table-cell>
          <table:table-cell table:number-columns-repeated="16347"/>
        </table:table-row>
        <table:table-row table:style-name="ro2">
          <table:table-cell office:value-type="float" office:value="139" calcext:value-type="float">
            <text:p>139</text:p>
          </table:table-cell>
          <table:table-cell office:value-type="float" office:value="28" calcext:value-type="float">
            <text:p>28</text:p>
          </table:table-cell>
          <table:table-cell office:value-type="string" calcext:value-type="string">
            <text:p>2-7</text:p>
          </table:table-cell>
          <table:table-cell office:value-type="float" office:value="7" calcext:value-type="float">
            <text:p>7</text:p>
          </table:table-cell>
          <table:table-cell office:value-type="string" calcext:value-type="string">
            <text:p>日野富子</text:p>
          </table:table-cell>
          <table:table-cell office:value-type="string" calcext:value-type="string">
            <text:p>ひのとみこ</text:p>
          </table:table-cell>
          <table:table-cell office:value-type="string" calcext:value-type="string">
            <text:p>第２弾ブースターパック</text:p>
          </table:table-cell>
          <table:table-cell table:formula="of:=VLOOKUP([.G140];[$収録番号.$A$1:$収録番号.$B$9];2;0)" office:value-type="float" office:value="25" calcext:value-type="float">
            <text:p>25</text:p>
          </table:table-cell>
          <table:table-cell office:value-type="string" calcext:value-type="string">
            <text:p>R</text:p>
          </table:table-cell>
          <table:table-cell table:formula="of:=VLOOKUP([.I140];[$レアリティ番号.$A$1:$レアリティ番号.$B$4];2;0)" office:value-type="float" office:value="2" calcext:value-type="float">
            <text:p>2</text:p>
          </table:table-cell>
          <table:table-cell office:value-type="string" calcext:value-type="string">
            <text:p>イジン</text:p>
          </table:table-cell>
          <table:table-cell table:formula="of:=VLOOKUP([.K140];[$種類番号.$A$1:$種類番号.$B$4];2;0)" office:value-type="float" office:value="1" calcext:value-type="float">
            <text:p>1</text:p>
          </table:table-cell>
          <table:table-cell office:value-type="string" calcext:value-type="string">
            <text:p>赤</text:p>
          </table:table-cell>
          <table:table-cell table:formula="of:=VLOOKUP([.M140];[$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4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40];[$特性番号.$A$1:$特性番号.$B$8];2;0);0)" office:value-type="float" office:value="0" calcext:value-type="float">
            <text:p>0</text:p>
          </table:table-cell>
          <table:table-cell office:value-type="string" calcext:value-type="string">
            <text:p>『ストーン』マリョクが自分の魔力ゾーンに置かれたときに発動できる。1ドローするか、自分の山札の上から1枚を裏のまま魔力ゾーンに置く。</text:p>
          </table:table-cell>
          <table:table-cell table:style-name="ce8" office:value-type="string" calcext:value-type="string">
            <text:p>反魂</text:p>
          </table:table-cell>
          <table:table-cell table:formula="of:=IFERROR(VLOOKUP([.$V140];[$遺業能力番号.$A$1:$遺業能力番号.$B$9];2;0);0)" office:value-type="float" office:value="6" calcext:value-type="float">
            <text:p>6</text:p>
          </table:table-cell>
          <table:table-cell office:value-type="string" calcext:value-type="string">
            <text:p>https://one-draw.jp/ijinden/cardlist/002/card/02_007.png</text:p>
          </table:table-cell>
          <table:table-cell table:formula="of:=CONCATENATE([$JSON.$A$1];[.$C140];[$JSON.$B$1];[.$E140];[$JSON.$C$1];[.$F140];[$JSON.$D$1];IF(ISNA([.$S140]);&quot;null&quot;;&quot;&quot;&quot;&quot;&amp;[.$S140]&amp;&quot;&quot;&quot;&quot;);[$JSON.$E$1];[.$U140];[$JSON.$F$1];IF(ISNA([.$V140]);&quot;null&quot;;&quot;&quot;&quot;&quot;&amp;[.$V140]&amp;&quot;&quot;&quot;&quot;);[$JSON.$G$1];[.$X140];[$JSON.$H$1];[.$H140];[$JSON.$I$1];[.J140];[$JSON.$J$1];[.$L140];[$JSON.$K$1];[.$O140];[$JSON.$L$1];[.$N140];[$JSON.$M$1];[.$R140];[$JSON.$N$1];[.$T140];[$JSON.$O$1];[.$W140];[$JSON.$P$1];[.$A140];[$JSON.$Q$1];[.$B140];[$JSON.$R$1])" office:value-type="string" office:string-value="{&quot;id&quot;:&quot;2-7&quot;,&quot;name&quot;:&quot;日野富子&quot;,&quot;kana&quot;:&quot;ひのとみこ&quot;,&quot;traitText&quot;:null,&quot;ruleText&quot;:&quot;『ストーン』マリョクが自分の魔力ゾーンに置かれたときに発動できる。1ドローするか、自分の山札の上から1枚を裏のまま魔力ゾーンに置く。&quot;,&quot;legacyText&quot;:&quot;反魂&quot;,&quot;imageUrl&quot;:&quot;https://one-draw.jp/ijinden/cardlist/002/card/02_007.png&quot;,&quot;expansion&quot;:25,&quot;rarity&quot;:2,&quot;type&quot;:1,&quot;level&quot;:2,&quot;color&quot;:1,&quot;term&quot;:0,&quot;trait&quot;:0,&quot;legacy&quot;:6,&quot;orderTable&quot;:139,&quot;orderDeck&quot;:28}," calcext:value-type="string">
            <text:p>{"id":"2-7","name":"日野富子","kana":"ひのとみこ","traitText":null,"ruleText":"『ストーン』マリョクが自分の魔力ゾーンに置かれたときに発動できる。1ドローするか、自分の山札の上から1枚を裏のまま魔力ゾーンに置く。","legacyText":"反魂","imageUrl":"https://one-draw.jp/ijinden/cardlist/002/card/02_007.png","expansion":25,"rarity":2,"type":1,"level":2,"color":1,"term":0,"trait":0,"legacy":6,"orderTable":139,"orderDeck":28},</text:p>
          </table:table-cell>
          <table:table-cell table:number-columns-repeated="16347"/>
        </table:table-row>
        <table:table-row table:style-name="ro2">
          <table:table-cell office:value-type="float" office:value="140" calcext:value-type="float">
            <text:p>140</text:p>
          </table:table-cell>
          <table:table-cell office:value-type="float" office:value="234" calcext:value-type="float">
            <text:p>234</text:p>
          </table:table-cell>
          <table:table-cell office:value-type="string" calcext:value-type="string">
            <text:p>2-8</text:p>
          </table:table-cell>
          <table:table-cell office:value-type="float" office:value="8" calcext:value-type="float">
            <text:p>8</text:p>
          </table:table-cell>
          <table:table-cell office:value-type="string" calcext:value-type="string">
            <text:p>豊臣秀吉</text:p>
          </table:table-cell>
          <table:table-cell office:value-type="string" calcext:value-type="string">
            <text:p>とよとみひでよし</text:p>
          </table:table-cell>
          <table:table-cell office:value-type="string" calcext:value-type="string">
            <text:p>第２弾ブースターパック</text:p>
          </table:table-cell>
          <table:table-cell table:formula="of:=VLOOKUP([.G141];[$収録番号.$A$1:$収録番号.$B$9];2;0)" office:value-type="float" office:value="25" calcext:value-type="float">
            <text:p>25</text:p>
          </table:table-cell>
          <table:table-cell office:value-type="string" calcext:value-type="string">
            <text:p>R</text:p>
          </table:table-cell>
          <table:table-cell table:formula="of:=VLOOKUP([.I141];[$レアリティ番号.$A$1:$レアリティ番号.$B$4];2;0)" office:value-type="float" office:value="2" calcext:value-type="float">
            <text:p>2</text:p>
          </table:table-cell>
          <table:table-cell office:value-type="string" calcext:value-type="string">
            <text:p>イジン</text:p>
          </table:table-cell>
          <table:table-cell table:formula="of:=VLOOKUP([.K141];[$種類番号.$A$1:$種類番号.$B$4];2;0)" office:value-type="float" office:value="1" calcext:value-type="float">
            <text:p>1</text:p>
          </table:table-cell>
          <table:table-cell office:value-type="string" calcext:value-type="string">
            <text:p>赤</text:p>
          </table:table-cell>
          <table:table-cell table:formula="of:=VLOOKUP([.M141];[$色番号.$A$1:$色番号.$B$10];2;0)" office:value-type="float" office:value="1" calcext:value-type="float">
            <text:p>1</text:p>
          </table:table-cell>
          <table:table-cell office:value-type="float" office:value="10" calcext:value-type="float">
            <text:p>1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4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41];[$特性番号.$A$1:$特性番号.$B$8];2;0);0)" office:value-type="float" office:value="0" calcext:value-type="float">
            <text:p>0</text:p>
          </table:table-cell>
          <table:table-cell office:value-type="string" calcext:value-type="string">
            <text:p>これのイジン召喚に際し、これのレベルは、自分の戦場のイジンの最も高いレベルと同じだけ下がる。¶即応¶戦場に置かれたときに発動できる。追加でバトルする。</text:p>
          </table:table-cell>
          <table:table-cell table:style-name="ce8" table:formula="of:=NA()" office:value-type="string" office:string-value="" calcext:value-type="error">
            <text:p>#N/A</text:p>
          </table:table-cell>
          <table:table-cell table:formula="of:=IFERROR(VLOOKUP([.$V141];[$遺業能力番号.$A$1:$遺業能力番号.$B$9];2;0);0)" office:value-type="float" office:value="0" calcext:value-type="float">
            <text:p>0</text:p>
          </table:table-cell>
          <table:table-cell office:value-type="string" calcext:value-type="string">
            <text:p>https://one-draw.jp/ijinden/cardlist/002/card/02_008.png</text:p>
          </table:table-cell>
          <table:table-cell table:formula="of:=CONCATENATE([$JSON.$A$1];[.$C141];[$JSON.$B$1];[.$E141];[$JSON.$C$1];[.$F141];[$JSON.$D$1];IF(ISNA([.$S141]);&quot;null&quot;;&quot;&quot;&quot;&quot;&amp;[.$S141]&amp;&quot;&quot;&quot;&quot;);[$JSON.$E$1];[.$U141];[$JSON.$F$1];IF(ISNA([.$V141]);&quot;null&quot;;&quot;&quot;&quot;&quot;&amp;[.$V141]&amp;&quot;&quot;&quot;&quot;);[$JSON.$G$1];[.$X141];[$JSON.$H$1];[.$H141];[$JSON.$I$1];[.J141];[$JSON.$J$1];[.$L141];[$JSON.$K$1];[.$O141];[$JSON.$L$1];[.$N141];[$JSON.$M$1];[.$R141];[$JSON.$N$1];[.$T141];[$JSON.$O$1];[.$W141];[$JSON.$P$1];[.$A141];[$JSON.$Q$1];[.$B141];[$JSON.$R$1])" office:value-type="string" office:string-value="{&quot;id&quot;:&quot;2-8&quot;,&quot;name&quot;:&quot;豊臣秀吉&quot;,&quot;kana&quot;:&quot;とよとみひでよし&quot;,&quot;traitText&quot;:null,&quot;ruleText&quot;:&quot;これのイジン召喚に際し、これのレベルは、自分の戦場のイジンの最も高いレベルと同じだけ下がる。¶即応¶戦場に置かれたときに発動できる。追加でバトルする。&quot;,&quot;legacyText&quot;:null,&quot;imageUrl&quot;:&quot;https://one-draw.jp/ijinden/cardlist/002/card/02_008.png&quot;,&quot;expansion&quot;:25,&quot;rarity&quot;:2,&quot;type&quot;:1,&quot;level&quot;:10,&quot;color&quot;:1,&quot;term&quot;:0,&quot;trait&quot;:0,&quot;legacy&quot;:0,&quot;orderTable&quot;:140,&quot;orderDeck&quot;:234}," calcext:value-type="string">
            <text:p>{"id":"2-8","name":"豊臣秀吉","kana":"とよとみひでよし","traitText":null,"ruleText":"これのイジン召喚に際し、これのレベルは、自分の戦場のイジンの最も高いレベルと同じだけ下がる。¶即応¶戦場に置かれたときに発動できる。追加でバトルする。","legacyText":null,"imageUrl":"https://one-draw.jp/ijinden/cardlist/002/card/02_008.png","expansion":25,"rarity":2,"type":1,"level":10,"color":1,"term":0,"trait":0,"legacy":0,"orderTable":140,"orderDeck":234},</text:p>
          </table:table-cell>
          <table:table-cell table:number-columns-repeated="16347"/>
        </table:table-row>
        <table:table-row table:style-name="ro2">
          <table:table-cell office:value-type="float" office:value="141" calcext:value-type="float">
            <text:p>141</text:p>
          </table:table-cell>
          <table:table-cell office:value-type="float" office:value="148" calcext:value-type="float">
            <text:p>148</text:p>
          </table:table-cell>
          <table:table-cell office:value-type="string" calcext:value-type="string">
            <text:p>2-9</text:p>
          </table:table-cell>
          <table:table-cell office:value-type="float" office:value="9" calcext:value-type="float">
            <text:p>9</text:p>
          </table:table-cell>
          <table:table-cell office:value-type="string" calcext:value-type="string">
            <text:p>石田三成</text:p>
          </table:table-cell>
          <table:table-cell office:value-type="string" calcext:value-type="string">
            <text:p>いしだみつなり</text:p>
          </table:table-cell>
          <table:table-cell office:value-type="string" calcext:value-type="string">
            <text:p>第２弾ブースターパック</text:p>
          </table:table-cell>
          <table:table-cell table:formula="of:=VLOOKUP([.G142];[$収録番号.$A$1:$収録番号.$B$9];2;0)" office:value-type="float" office:value="25" calcext:value-type="float">
            <text:p>25</text:p>
          </table:table-cell>
          <table:table-cell office:value-type="string" calcext:value-type="string">
            <text:p>N</text:p>
          </table:table-cell>
          <table:table-cell table:formula="of:=VLOOKUP([.I142];[$レアリティ番号.$A$1:$レアリティ番号.$B$4];2;0)" office:value-type="float" office:value="1" calcext:value-type="float">
            <text:p>1</text:p>
          </table:table-cell>
          <table:table-cell office:value-type="string" calcext:value-type="string">
            <text:p>イジン</text:p>
          </table:table-cell>
          <table:table-cell table:formula="of:=VLOOKUP([.K142];[$種類番号.$A$1:$種類番号.$B$4];2;0)" office:value-type="float" office:value="1" calcext:value-type="float">
            <text:p>1</text:p>
          </table:table-cell>
          <table:table-cell office:value-type="string" calcext:value-type="string">
            <text:p>赤</text:p>
          </table:table-cell>
          <table:table-cell table:formula="of:=VLOOKUP([.M142];[$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決起</text:p>
          </table:table-cell>
          <table:table-cell table:formula="of:=IFERROR(VLOOKUP([.$Q142];[$能力語番号.$A$1:$能力語番号.$B$10];2;0);0)" office:value-type="float" office:value="4" calcext:value-type="float">
            <text:p>4</text:p>
          </table:table-cell>
          <table:table-cell table:formula="of:=NA()" office:value-type="string" office:string-value="" calcext:value-type="error">
            <text:p>#N/A</text:p>
          </table:table-cell>
          <table:table-cell table:formula="of:=IFERROR(VLOOKUP([.$S142];[$特性番号.$A$1:$特性番号.$B$8];2;0);0)" office:value-type="float" office:value="0" calcext:value-type="float">
            <text:p>0</text:p>
          </table:table-cell>
          <table:table-cell office:value-type="string" calcext:value-type="string">
            <text:p>戦場に置かれたとき、マリョク配置権+1する。¶決起 - マリョク配置によってカードが自分の魔力ゾーンに置かれたとき、自分の魔力ゾーンのマリョクが4つ以上なら発動できる。1ドローするか、イジン召喚権+1する。</text:p>
          </table:table-cell>
          <table:table-cell table:style-name="ce8" office:value-type="string" calcext:value-type="string">
            <text:p>魔力化</text:p>
          </table:table-cell>
          <table:table-cell table:formula="of:=IFERROR(VLOOKUP([.$V142];[$遺業能力番号.$A$1:$遺業能力番号.$B$9];2;0);0)" office:value-type="float" office:value="1" calcext:value-type="float">
            <text:p>1</text:p>
          </table:table-cell>
          <table:table-cell office:value-type="string" calcext:value-type="string">
            <text:p>https://one-draw.jp/ijinden/cardlist/002/card/02_009.png</text:p>
          </table:table-cell>
          <table:table-cell table:formula="of:=CONCATENATE([$JSON.$A$1];[.$C142];[$JSON.$B$1];[.$E142];[$JSON.$C$1];[.$F142];[$JSON.$D$1];IF(ISNA([.$S142]);&quot;null&quot;;&quot;&quot;&quot;&quot;&amp;[.$S142]&amp;&quot;&quot;&quot;&quot;);[$JSON.$E$1];[.$U142];[$JSON.$F$1];IF(ISNA([.$V142]);&quot;null&quot;;&quot;&quot;&quot;&quot;&amp;[.$V142]&amp;&quot;&quot;&quot;&quot;);[$JSON.$G$1];[.$X142];[$JSON.$H$1];[.$H142];[$JSON.$I$1];[.J142];[$JSON.$J$1];[.$L142];[$JSON.$K$1];[.$O142];[$JSON.$L$1];[.$N142];[$JSON.$M$1];[.$R142];[$JSON.$N$1];[.$T142];[$JSON.$O$1];[.$W142];[$JSON.$P$1];[.$A142];[$JSON.$Q$1];[.$B142];[$JSON.$R$1])" office:value-type="string" office:string-value="{&quot;id&quot;:&quot;2-9&quot;,&quot;name&quot;:&quot;石田三成&quot;,&quot;kana&quot;:&quot;いしだみつなり&quot;,&quot;traitText&quot;:null,&quot;ruleText&quot;:&quot;戦場に置かれたとき、マリョク配置権+1する。¶決起 - マリョク配置によってカードが自分の魔力ゾーンに置かれたとき、自分の魔力ゾーンのマリョクが4つ以上なら発動できる。1ドローするか、イジン召喚権+1する。&quot;,&quot;legacyText&quot;:&quot;魔力化&quot;,&quot;imageUrl&quot;:&quot;https://one-draw.jp/ijinden/cardlist/002/card/02_009.png&quot;,&quot;expansion&quot;:25,&quot;rarity&quot;:1,&quot;type&quot;:1,&quot;level&quot;:5,&quot;color&quot;:1,&quot;term&quot;:4,&quot;trait&quot;:0,&quot;legacy&quot;:1,&quot;orderTable&quot;:141,&quot;orderDeck&quot;:148}," calcext:value-type="string">
            <text:p>{"id":"2-9","name":"石田三成","kana":"いしだみつなり","traitText":null,"ruleText":"戦場に置かれたとき、マリョク配置権+1する。¶決起 - マリョク配置によってカードが自分の魔力ゾーンに置かれたとき、自分の魔力ゾーンのマリョクが4つ以上なら発動できる。1ドローするか、イジン召喚権+1する。","legacyText":"魔力化","imageUrl":"https://one-draw.jp/ijinden/cardlist/002/card/02_009.png","expansion":25,"rarity":1,"type":1,"level":5,"color":1,"term":4,"trait":0,"legacy":1,"orderTable":141,"orderDeck":148},</text:p>
          </table:table-cell>
          <table:table-cell table:number-columns-repeated="16347"/>
        </table:table-row>
        <table:table-row table:style-name="ro2">
          <table:table-cell office:value-type="float" office:value="142" calcext:value-type="float">
            <text:p>142</text:p>
          </table:table-cell>
          <table:table-cell office:value-type="float" office:value="4" calcext:value-type="float">
            <text:p>4</text:p>
          </table:table-cell>
          <table:table-cell office:value-type="string" calcext:value-type="string">
            <text:p>2-10</text:p>
          </table:table-cell>
          <table:table-cell office:value-type="float" office:value="10" calcext:value-type="float">
            <text:p>10</text:p>
          </table:table-cell>
          <table:table-cell office:value-type="string" calcext:value-type="string">
            <text:p>栄西</text:p>
          </table:table-cell>
          <table:table-cell office:value-type="string" calcext:value-type="string">
            <text:p>えいさい</text:p>
          </table:table-cell>
          <table:table-cell office:value-type="string" calcext:value-type="string">
            <text:p>第２弾ブースターパック</text:p>
          </table:table-cell>
          <table:table-cell table:formula="of:=VLOOKUP([.G143];[$収録番号.$A$1:$収録番号.$B$9];2;0)" office:value-type="float" office:value="25" calcext:value-type="float">
            <text:p>25</text:p>
          </table:table-cell>
          <table:table-cell office:value-type="string" calcext:value-type="string">
            <text:p>N</text:p>
          </table:table-cell>
          <table:table-cell table:formula="of:=VLOOKUP([.I143];[$レアリティ番号.$A$1:$レアリティ番号.$B$4];2;0)" office:value-type="float" office:value="1" calcext:value-type="float">
            <text:p>1</text:p>
          </table:table-cell>
          <table:table-cell office:value-type="string" calcext:value-type="string">
            <text:p>イジン</text:p>
          </table:table-cell>
          <table:table-cell table:formula="of:=VLOOKUP([.K143];[$種類番号.$A$1:$種類番号.$B$4];2;0)" office:value-type="float" office:value="1" calcext:value-type="float">
            <text:p>1</text:p>
          </table:table-cell>
          <table:table-cell office:value-type="string" calcext:value-type="string">
            <text:p>赤</text:p>
          </table:table-cell>
          <table:table-cell table:formula="of:=VLOOKUP([.M143];[$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4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43];[$特性番号.$A$1:$特性番号.$B$8];2;0);0)" office:value-type="float" office:value="0" calcext:value-type="float">
            <text:p>0</text:p>
          </table:table-cell>
          <table:table-cell office:value-type="string" calcext:value-type="string">
            <text:p>自分が1体だけでアタックしたときに発動する。このターンの間、アタッカーは「ダブルプレッシャー」を得る。¶ブロック+2000</text:p>
          </table:table-cell>
          <table:table-cell table:style-name="ce8" office:value-type="string" calcext:value-type="string">
            <text:p>1ドローする</text:p>
          </table:table-cell>
          <table:table-cell table:formula="of:=IFERROR(VLOOKUP([.$V143];[$遺業能力番号.$A$1:$遺業能力番号.$B$9];2;0);0)" office:value-type="float" office:value="4" calcext:value-type="float">
            <text:p>4</text:p>
          </table:table-cell>
          <table:table-cell office:value-type="string" calcext:value-type="string">
            <text:p>https://one-draw.jp/ijinden/cardlist/002/card/02_010.png</text:p>
          </table:table-cell>
          <table:table-cell table:formula="of:=CONCATENATE([$JSON.$A$1];[.$C143];[$JSON.$B$1];[.$E143];[$JSON.$C$1];[.$F143];[$JSON.$D$1];IF(ISNA([.$S143]);&quot;null&quot;;&quot;&quot;&quot;&quot;&amp;[.$S143]&amp;&quot;&quot;&quot;&quot;);[$JSON.$E$1];[.$U143];[$JSON.$F$1];IF(ISNA([.$V143]);&quot;null&quot;;&quot;&quot;&quot;&quot;&amp;[.$V143]&amp;&quot;&quot;&quot;&quot;);[$JSON.$G$1];[.$X143];[$JSON.$H$1];[.$H143];[$JSON.$I$1];[.J143];[$JSON.$J$1];[.$L143];[$JSON.$K$1];[.$O143];[$JSON.$L$1];[.$N143];[$JSON.$M$1];[.$R143];[$JSON.$N$1];[.$T143];[$JSON.$O$1];[.$W143];[$JSON.$P$1];[.$A143];[$JSON.$Q$1];[.$B143];[$JSON.$R$1])" office:value-type="string" office:string-value="{&quot;id&quot;:&quot;2-10&quot;,&quot;name&quot;:&quot;栄西&quot;,&quot;kana&quot;:&quot;えいさい&quot;,&quot;traitText&quot;:null,&quot;ruleText&quot;:&quot;自分が1体だけでアタックしたときに発動する。このターンの間、アタッカーは「ダブルプレッシャー」を得る。¶ブロック+2000&quot;,&quot;legacyText&quot;:&quot;1ドローする&quot;,&quot;imageUrl&quot;:&quot;https://one-draw.jp/ijinden/cardlist/002/card/02_010.png&quot;,&quot;expansion&quot;:25,&quot;rarity&quot;:1,&quot;type&quot;:1,&quot;level&quot;:1,&quot;color&quot;:1,&quot;term&quot;:0,&quot;trait&quot;:0,&quot;legacy&quot;:4,&quot;orderTable&quot;:142,&quot;orderDeck&quot;:4}," calcext:value-type="string">
            <text:p>{"id":"2-10","name":"栄西","kana":"えいさい","traitText":null,"ruleText":"自分が1体だけでアタックしたときに発動する。このターンの間、アタッカーは「ダブルプレッシャー」を得る。¶ブロック+2000","legacyText":"1ドローする","imageUrl":"https://one-draw.jp/ijinden/cardlist/002/card/02_010.png","expansion":25,"rarity":1,"type":1,"level":1,"color":1,"term":0,"trait":0,"legacy":4,"orderTable":142,"orderDeck":4},</text:p>
          </table:table-cell>
          <table:table-cell table:number-columns-repeated="16347"/>
        </table:table-row>
        <table:table-row table:style-name="ro2">
          <table:table-cell office:value-type="float" office:value="143" calcext:value-type="float">
            <text:p>143</text:p>
          </table:table-cell>
          <table:table-cell office:value-type="float" office:value="70" calcext:value-type="float">
            <text:p>70</text:p>
          </table:table-cell>
          <table:table-cell office:value-type="string" calcext:value-type="string">
            <text:p>2-11</text:p>
          </table:table-cell>
          <table:table-cell office:value-type="float" office:value="11" calcext:value-type="float">
            <text:p>11</text:p>
          </table:table-cell>
          <table:table-cell office:value-type="string" calcext:value-type="string">
            <text:p>道元</text:p>
          </table:table-cell>
          <table:table-cell office:value-type="string" calcext:value-type="string">
            <text:p>どうげん</text:p>
          </table:table-cell>
          <table:table-cell office:value-type="string" calcext:value-type="string">
            <text:p>第２弾ブースターパック</text:p>
          </table:table-cell>
          <table:table-cell table:formula="of:=VLOOKUP([.G144];[$収録番号.$A$1:$収録番号.$B$9];2;0)" office:value-type="float" office:value="25" calcext:value-type="float">
            <text:p>25</text:p>
          </table:table-cell>
          <table:table-cell office:value-type="string" calcext:value-type="string">
            <text:p>N</text:p>
          </table:table-cell>
          <table:table-cell table:formula="of:=VLOOKUP([.I144];[$レアリティ番号.$A$1:$レアリティ番号.$B$4];2;0)" office:value-type="float" office:value="1" calcext:value-type="float">
            <text:p>1</text:p>
          </table:table-cell>
          <table:table-cell office:value-type="string" calcext:value-type="string">
            <text:p>イジン</text:p>
          </table:table-cell>
          <table:table-cell table:formula="of:=VLOOKUP([.K144];[$種類番号.$A$1:$種類番号.$B$4];2;0)" office:value-type="float" office:value="1" calcext:value-type="float">
            <text:p>1</text:p>
          </table:table-cell>
          <table:table-cell office:value-type="string" calcext:value-type="string">
            <text:p>赤</text:p>
          </table:table-cell>
          <table:table-cell table:formula="of:=VLOOKUP([.M144];[$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4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44];[$特性番号.$A$1:$特性番号.$B$8];2;0);0)" office:value-type="float" office:value="0" calcext:value-type="float">
            <text:p>0</text:p>
          </table:table-cell>
          <table:table-cell office:value-type="string" calcext:value-type="string">
            <text:p>自分が1体だけでアタックしたときに発動する。このターンの間、アタッカーは相手の戦場のイジン1体につき「アタック+3000」を得る。¶ブロック+2000</text:p>
          </table:table-cell>
          <table:table-cell table:style-name="ce8" office:value-type="string" calcext:value-type="string">
            <text:p>1ドローする</text:p>
          </table:table-cell>
          <table:table-cell table:formula="of:=IFERROR(VLOOKUP([.$V144];[$遺業能力番号.$A$1:$遺業能力番号.$B$9];2;0);0)" office:value-type="float" office:value="4" calcext:value-type="float">
            <text:p>4</text:p>
          </table:table-cell>
          <table:table-cell office:value-type="string" calcext:value-type="string">
            <text:p>https://one-draw.jp/ijinden/cardlist/002/card/02_011.png</text:p>
          </table:table-cell>
          <table:table-cell table:formula="of:=CONCATENATE([$JSON.$A$1];[.$C144];[$JSON.$B$1];[.$E144];[$JSON.$C$1];[.$F144];[$JSON.$D$1];IF(ISNA([.$S144]);&quot;null&quot;;&quot;&quot;&quot;&quot;&amp;[.$S144]&amp;&quot;&quot;&quot;&quot;);[$JSON.$E$1];[.$U144];[$JSON.$F$1];IF(ISNA([.$V144]);&quot;null&quot;;&quot;&quot;&quot;&quot;&amp;[.$V144]&amp;&quot;&quot;&quot;&quot;);[$JSON.$G$1];[.$X144];[$JSON.$H$1];[.$H144];[$JSON.$I$1];[.J144];[$JSON.$J$1];[.$L144];[$JSON.$K$1];[.$O144];[$JSON.$L$1];[.$N144];[$JSON.$M$1];[.$R144];[$JSON.$N$1];[.$T144];[$JSON.$O$1];[.$W144];[$JSON.$P$1];[.$A144];[$JSON.$Q$1];[.$B144];[$JSON.$R$1])" office:value-type="string" office:string-value="{&quot;id&quot;:&quot;2-11&quot;,&quot;name&quot;:&quot;道元&quot;,&quot;kana&quot;:&quot;どうげん&quot;,&quot;traitText&quot;:null,&quot;ruleText&quot;:&quot;自分が1体だけでアタックしたときに発動する。このターンの間、アタッカーは相手の戦場のイジン1体につき「アタック+3000」を得る。¶ブロック+2000&quot;,&quot;legacyText&quot;:&quot;1ドローする&quot;,&quot;imageUrl&quot;:&quot;https://one-draw.jp/ijinden/cardlist/002/card/02_011.png&quot;,&quot;expansion&quot;:25,&quot;rarity&quot;:1,&quot;type&quot;:1,&quot;level&quot;:3,&quot;color&quot;:1,&quot;term&quot;:0,&quot;trait&quot;:0,&quot;legacy&quot;:4,&quot;orderTable&quot;:143,&quot;orderDeck&quot;:70}," calcext:value-type="string">
            <text:p>{"id":"2-11","name":"道元","kana":"どうげん","traitText":null,"ruleText":"自分が1体だけでアタックしたときに発動する。このターンの間、アタッカーは相手の戦場のイジン1体につき「アタック+3000」を得る。¶ブロック+2000","legacyText":"1ドローする","imageUrl":"https://one-draw.jp/ijinden/cardlist/002/card/02_011.png","expansion":25,"rarity":1,"type":1,"level":3,"color":1,"term":0,"trait":0,"legacy":4,"orderTable":143,"orderDeck":70},</text:p>
          </table:table-cell>
          <table:table-cell table:number-columns-repeated="16347"/>
        </table:table-row>
        <table:table-row table:style-name="ro2">
          <table:table-cell office:value-type="float" office:value="144" calcext:value-type="float">
            <text:p>144</text:p>
          </table:table-cell>
          <table:table-cell office:value-type="float" office:value="229" calcext:value-type="float">
            <text:p>229</text:p>
          </table:table-cell>
          <table:table-cell office:value-type="string" calcext:value-type="string">
            <text:p>2-12</text:p>
          </table:table-cell>
          <table:table-cell office:value-type="float" office:value="12" calcext:value-type="float">
            <text:p>12</text:p>
          </table:table-cell>
          <table:table-cell office:value-type="string" calcext:value-type="string">
            <text:p>足利義昭</text:p>
          </table:table-cell>
          <table:table-cell office:value-type="string" calcext:value-type="string">
            <text:p>あしかがよしあき</text:p>
          </table:table-cell>
          <table:table-cell office:value-type="string" calcext:value-type="string">
            <text:p>第２弾ブースターパック</text:p>
          </table:table-cell>
          <table:table-cell table:formula="of:=VLOOKUP([.G145];[$収録番号.$A$1:$収録番号.$B$9];2;0)" office:value-type="float" office:value="25" calcext:value-type="float">
            <text:p>25</text:p>
          </table:table-cell>
          <table:table-cell office:value-type="string" calcext:value-type="string">
            <text:p>N</text:p>
          </table:table-cell>
          <table:table-cell table:formula="of:=VLOOKUP([.I145];[$レアリティ番号.$A$1:$レアリティ番号.$B$4];2;0)" office:value-type="float" office:value="1" calcext:value-type="float">
            <text:p>1</text:p>
          </table:table-cell>
          <table:table-cell office:value-type="string" calcext:value-type="string">
            <text:p>イジン</text:p>
          </table:table-cell>
          <table:table-cell table:formula="of:=VLOOKUP([.K145];[$種類番号.$A$1:$種類番号.$B$4];2;0)" office:value-type="float" office:value="1" calcext:value-type="float">
            <text:p>1</text:p>
          </table:table-cell>
          <table:table-cell office:value-type="string" calcext:value-type="string">
            <text:p>赤</text:p>
          </table:table-cell>
          <table:table-cell table:formula="of:=VLOOKUP([.M145];[$色番号.$A$1:$色番号.$B$10];2;0)" office:value-type="float" office:value="1" calcext:value-type="float">
            <text:p>1</text:p>
          </table:table-cell>
          <table:table-cell office:value-type="float" office:value="9" calcext:value-type="float">
            <text:p>9</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4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45];[$特性番号.$A$1:$特性番号.$B$8];2;0);0)" office:value-type="float" office:value="0" calcext:value-type="float">
            <text:p>0</text:p>
          </table:table-cell>
          <table:table-cell office:value-type="string" calcext:value-type="string">
            <text:p>アタッカーになったときに発動する。このターンの間、アタッカーは「イジンにブロックされず、破壊されない」を得る。</text:p>
          </table:table-cell>
          <table:table-cell table:style-name="ce8" office:value-type="string" calcext:value-type="string">
            <text:p>魔力化</text:p>
          </table:table-cell>
          <table:table-cell table:formula="of:=IFERROR(VLOOKUP([.$V145];[$遺業能力番号.$A$1:$遺業能力番号.$B$9];2;0);0)" office:value-type="float" office:value="1" calcext:value-type="float">
            <text:p>1</text:p>
          </table:table-cell>
          <table:table-cell office:value-type="string" calcext:value-type="string">
            <text:p>https://one-draw.jp/ijinden/cardlist/002/card/02_012.png</text:p>
          </table:table-cell>
          <table:table-cell table:formula="of:=CONCATENATE([$JSON.$A$1];[.$C145];[$JSON.$B$1];[.$E145];[$JSON.$C$1];[.$F145];[$JSON.$D$1];IF(ISNA([.$S145]);&quot;null&quot;;&quot;&quot;&quot;&quot;&amp;[.$S145]&amp;&quot;&quot;&quot;&quot;);[$JSON.$E$1];[.$U145];[$JSON.$F$1];IF(ISNA([.$V145]);&quot;null&quot;;&quot;&quot;&quot;&quot;&amp;[.$V145]&amp;&quot;&quot;&quot;&quot;);[$JSON.$G$1];[.$X145];[$JSON.$H$1];[.$H145];[$JSON.$I$1];[.J145];[$JSON.$J$1];[.$L145];[$JSON.$K$1];[.$O145];[$JSON.$L$1];[.$N145];[$JSON.$M$1];[.$R145];[$JSON.$N$1];[.$T145];[$JSON.$O$1];[.$W145];[$JSON.$P$1];[.$A145];[$JSON.$Q$1];[.$B145];[$JSON.$R$1])" office:value-type="string" office:string-value="{&quot;id&quot;:&quot;2-12&quot;,&quot;name&quot;:&quot;足利義昭&quot;,&quot;kana&quot;:&quot;あしかがよしあき&quot;,&quot;traitText&quot;:null,&quot;ruleText&quot;:&quot;アタッカーになったときに発動する。このターンの間、アタッカーは「イジンにブロックされず、破壊されない」を得る。&quot;,&quot;legacyText&quot;:&quot;魔力化&quot;,&quot;imageUrl&quot;:&quot;https://one-draw.jp/ijinden/cardlist/002/card/02_012.png&quot;,&quot;expansion&quot;:25,&quot;rarity&quot;:1,&quot;type&quot;:1,&quot;level&quot;:9,&quot;color&quot;:1,&quot;term&quot;:0,&quot;trait&quot;:0,&quot;legacy&quot;:1,&quot;orderTable&quot;:144,&quot;orderDeck&quot;:229}," calcext:value-type="string">
            <text:p>{"id":"2-12","name":"足利義昭","kana":"あしかがよしあき","traitText":null,"ruleText":"アタッカーになったときに発動する。このターンの間、アタッカーは「イジンにブロックされず、破壊されない」を得る。","legacyText":"魔力化","imageUrl":"https://one-draw.jp/ijinden/cardlist/002/card/02_012.png","expansion":25,"rarity":1,"type":1,"level":9,"color":1,"term":0,"trait":0,"legacy":1,"orderTable":144,"orderDeck":229},</text:p>
          </table:table-cell>
          <table:table-cell table:number-columns-repeated="16347"/>
        </table:table-row>
        <table:table-row table:style-name="ro2">
          <table:table-cell office:value-type="float" office:value="145" calcext:value-type="float">
            <text:p>145</text:p>
          </table:table-cell>
          <table:table-cell office:value-type="float" office:value="182" calcext:value-type="float">
            <text:p>182</text:p>
          </table:table-cell>
          <table:table-cell office:value-type="string" calcext:value-type="string">
            <text:p>2-13</text:p>
          </table:table-cell>
          <table:table-cell office:value-type="float" office:value="13" calcext:value-type="float">
            <text:p>13</text:p>
          </table:table-cell>
          <table:table-cell office:value-type="string" calcext:value-type="string">
            <text:p>毛利輝元</text:p>
          </table:table-cell>
          <table:table-cell office:value-type="string" calcext:value-type="string">
            <text:p>もうりてるもと</text:p>
          </table:table-cell>
          <table:table-cell office:value-type="string" calcext:value-type="string">
            <text:p>第２弾ブースターパック</text:p>
          </table:table-cell>
          <table:table-cell table:formula="of:=VLOOKUP([.G146];[$収録番号.$A$1:$収録番号.$B$9];2;0)" office:value-type="float" office:value="25" calcext:value-type="float">
            <text:p>25</text:p>
          </table:table-cell>
          <table:table-cell office:value-type="string" calcext:value-type="string">
            <text:p>N</text:p>
          </table:table-cell>
          <table:table-cell table:formula="of:=VLOOKUP([.I146];[$レアリティ番号.$A$1:$レアリティ番号.$B$4];2;0)" office:value-type="float" office:value="1" calcext:value-type="float">
            <text:p>1</text:p>
          </table:table-cell>
          <table:table-cell office:value-type="string" calcext:value-type="string">
            <text:p>イジン</text:p>
          </table:table-cell>
          <table:table-cell table:formula="of:=VLOOKUP([.K146];[$種類番号.$A$1:$種類番号.$B$4];2;0)" office:value-type="float" office:value="1" calcext:value-type="float">
            <text:p>1</text:p>
          </table:table-cell>
          <table:table-cell office:value-type="string" calcext:value-type="string">
            <text:p>赤</text:p>
          </table:table-cell>
          <table:table-cell table:formula="of:=VLOOKUP([.M146];[$色番号.$A$1:$色番号.$B$10];2;0)" office:value-type="float" office:value="1" calcext:value-type="float">
            <text:p>1</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4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46];[$特性番号.$A$1:$特性番号.$B$8];2;0);0)" office:value-type="float" office:value="0" calcext:value-type="float">
            <text:p>0</text:p>
          </table:table-cell>
          <table:table-cell office:value-type="string" calcext:value-type="string">
            <text:p>即応¶戦場に置かれたとき、自分の戦場のガーディアン1体を山札の上に戻す。¶破壊されたとき、自分の山札の上から1枚をガーディアンにして戦場に置く。</text:p>
          </table:table-cell>
          <table:table-cell table:style-name="ce8" table:formula="of:=NA()" office:value-type="string" office:string-value="" calcext:value-type="error">
            <text:p>#N/A</text:p>
          </table:table-cell>
          <table:table-cell table:formula="of:=IFERROR(VLOOKUP([.$V146];[$遺業能力番号.$A$1:$遺業能力番号.$B$9];2;0);0)" office:value-type="float" office:value="0" calcext:value-type="float">
            <text:p>0</text:p>
          </table:table-cell>
          <table:table-cell office:value-type="string" calcext:value-type="string">
            <text:p>https://one-draw.jp/ijinden/cardlist/002/card/02_013.png</text:p>
          </table:table-cell>
          <table:table-cell table:formula="of:=CONCATENATE([$JSON.$A$1];[.$C146];[$JSON.$B$1];[.$E146];[$JSON.$C$1];[.$F146];[$JSON.$D$1];IF(ISNA([.$S146]);&quot;null&quot;;&quot;&quot;&quot;&quot;&amp;[.$S146]&amp;&quot;&quot;&quot;&quot;);[$JSON.$E$1];[.$U146];[$JSON.$F$1];IF(ISNA([.$V146]);&quot;null&quot;;&quot;&quot;&quot;&quot;&amp;[.$V146]&amp;&quot;&quot;&quot;&quot;);[$JSON.$G$1];[.$X146];[$JSON.$H$1];[.$H146];[$JSON.$I$1];[.J146];[$JSON.$J$1];[.$L146];[$JSON.$K$1];[.$O146];[$JSON.$L$1];[.$N146];[$JSON.$M$1];[.$R146];[$JSON.$N$1];[.$T146];[$JSON.$O$1];[.$W146];[$JSON.$P$1];[.$A146];[$JSON.$Q$1];[.$B146];[$JSON.$R$1])" office:value-type="string" office:string-value="{&quot;id&quot;:&quot;2-13&quot;,&quot;name&quot;:&quot;毛利輝元&quot;,&quot;kana&quot;:&quot;もうりてるもと&quot;,&quot;traitText&quot;:null,&quot;ruleText&quot;:&quot;即応¶戦場に置かれたとき、自分の戦場のガーディアン1体を山札の上に戻す。¶破壊されたとき、自分の山札の上から1枚をガーディアンにして戦場に置く。&quot;,&quot;legacyText&quot;:null,&quot;imageUrl&quot;:&quot;https://one-draw.jp/ijinden/cardlist/002/card/02_013.png&quot;,&quot;expansion&quot;:25,&quot;rarity&quot;:1,&quot;type&quot;:1,&quot;level&quot;:6,&quot;color&quot;:1,&quot;term&quot;:0,&quot;trait&quot;:0,&quot;legacy&quot;:0,&quot;orderTable&quot;:145,&quot;orderDeck&quot;:182}," calcext:value-type="string">
            <text:p>{"id":"2-13","name":"毛利輝元","kana":"もうりてるもと","traitText":null,"ruleText":"即応¶戦場に置かれたとき、自分の戦場のガーディアン1体を山札の上に戻す。¶破壊されたとき、自分の山札の上から1枚をガーディアンにして戦場に置く。","legacyText":null,"imageUrl":"https://one-draw.jp/ijinden/cardlist/002/card/02_013.png","expansion":25,"rarity":1,"type":1,"level":6,"color":1,"term":0,"trait":0,"legacy":0,"orderTable":145,"orderDeck":182},</text:p>
          </table:table-cell>
          <table:table-cell table:number-columns-repeated="16347"/>
        </table:table-row>
        <table:table-row table:style-name="ro2">
          <table:table-cell office:value-type="float" office:value="146" calcext:value-type="float">
            <text:p>146</text:p>
          </table:table-cell>
          <table:table-cell office:value-type="float" office:value="149" calcext:value-type="float">
            <text:p>149</text:p>
          </table:table-cell>
          <table:table-cell office:value-type="string" calcext:value-type="string">
            <text:p>2-14</text:p>
          </table:table-cell>
          <table:table-cell office:value-type="float" office:value="14" calcext:value-type="float">
            <text:p>14</text:p>
          </table:table-cell>
          <table:table-cell office:value-type="string" calcext:value-type="string">
            <text:p>北条時政</text:p>
          </table:table-cell>
          <table:table-cell office:value-type="string" calcext:value-type="string">
            <text:p>ほうじょうときまさ</text:p>
          </table:table-cell>
          <table:table-cell office:value-type="string" calcext:value-type="string">
            <text:p>第２弾ブースターパック</text:p>
          </table:table-cell>
          <table:table-cell table:formula="of:=VLOOKUP([.G147];[$収録番号.$A$1:$収録番号.$B$9];2;0)" office:value-type="float" office:value="25" calcext:value-type="float">
            <text:p>25</text:p>
          </table:table-cell>
          <table:table-cell office:value-type="string" calcext:value-type="string">
            <text:p>N</text:p>
          </table:table-cell>
          <table:table-cell table:formula="of:=VLOOKUP([.I147];[$レアリティ番号.$A$1:$レアリティ番号.$B$4];2;0)" office:value-type="float" office:value="1" calcext:value-type="float">
            <text:p>1</text:p>
          </table:table-cell>
          <table:table-cell office:value-type="string" calcext:value-type="string">
            <text:p>イジン</text:p>
          </table:table-cell>
          <table:table-cell table:formula="of:=VLOOKUP([.K147];[$種類番号.$A$1:$種類番号.$B$4];2;0)" office:value-type="float" office:value="1" calcext:value-type="float">
            <text:p>1</text:p>
          </table:table-cell>
          <table:table-cell office:value-type="string" calcext:value-type="string">
            <text:p>赤</text:p>
          </table:table-cell>
          <table:table-cell table:formula="of:=VLOOKUP([.M147];[$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47];[$能力語番号.$A$1:$能力語番号.$B$10];2;0);0)" office:value-type="float" office:value="0" calcext:value-type="float">
            <text:p>0</text:p>
          </table:table-cell>
          <table:table-cell office:value-type="string" calcext:value-type="string">
            <text:p>剣術</text:p>
          </table:table-cell>
          <table:table-cell table:formula="of:=IFERROR(VLOOKUP([.$S147];[$特性番号.$A$1:$特性番号.$B$8];2;0);0)" office:value-type="float" office:value="1" calcext:value-type="float">
            <text:p>1</text:p>
          </table:table-cell>
          <table:table-cell office:value-type="string" calcext:value-type="string">
            <text:p>アタッカーになったとき、自分の戦場のイジンとガーディアンをすきなだけ寝かせて発動できる。このターンの間、寝かせた1体につき「アタック+2000」を得る。¶パワー5000以上の間「ダブルプレッシャー」を得る。</text:p>
          </table:table-cell>
          <table:table-cell table:style-name="ce8" office:value-type="string" calcext:value-type="string">
            <text:p>1ドローする</text:p>
          </table:table-cell>
          <table:table-cell table:formula="of:=IFERROR(VLOOKUP([.$V147];[$遺業能力番号.$A$1:$遺業能力番号.$B$9];2;0);0)" office:value-type="float" office:value="4" calcext:value-type="float">
            <text:p>4</text:p>
          </table:table-cell>
          <table:table-cell office:value-type="string" calcext:value-type="string">
            <text:p>https://one-draw.jp/ijinden/cardlist/002/card/02_014.png</text:p>
          </table:table-cell>
          <table:table-cell table:formula="of:=CONCATENATE([$JSON.$A$1];[.$C147];[$JSON.$B$1];[.$E147];[$JSON.$C$1];[.$F147];[$JSON.$D$1];IF(ISNA([.$S147]);&quot;null&quot;;&quot;&quot;&quot;&quot;&amp;[.$S147]&amp;&quot;&quot;&quot;&quot;);[$JSON.$E$1];[.$U147];[$JSON.$F$1];IF(ISNA([.$V147]);&quot;null&quot;;&quot;&quot;&quot;&quot;&amp;[.$V147]&amp;&quot;&quot;&quot;&quot;);[$JSON.$G$1];[.$X147];[$JSON.$H$1];[.$H147];[$JSON.$I$1];[.J147];[$JSON.$J$1];[.$L147];[$JSON.$K$1];[.$O147];[$JSON.$L$1];[.$N147];[$JSON.$M$1];[.$R147];[$JSON.$N$1];[.$T147];[$JSON.$O$1];[.$W147];[$JSON.$P$1];[.$A147];[$JSON.$Q$1];[.$B147];[$JSON.$R$1])" office:value-type="string" office:string-value="{&quot;id&quot;:&quot;2-14&quot;,&quot;name&quot;:&quot;北条時政&quot;,&quot;kana&quot;:&quot;ほうじょうときまさ&quot;,&quot;traitText&quot;:&quot;剣術&quot;,&quot;ruleText&quot;:&quot;アタッカーになったとき、自分の戦場のイジンとガーディアンをすきなだけ寝かせて発動できる。このターンの間、寝かせた1体につき「アタック+2000」を得る。¶パワー5000以上の間「ダブルプレッシャー」を得る。&quot;,&quot;legacyText&quot;:&quot;1ドローする&quot;,&quot;imageUrl&quot;:&quot;https://one-draw.jp/ijinden/cardlist/002/card/02_014.png&quot;,&quot;expansion&quot;:25,&quot;rarity&quot;:1,&quot;type&quot;:1,&quot;level&quot;:5,&quot;color&quot;:1,&quot;term&quot;:0,&quot;trait&quot;:1,&quot;legacy&quot;:4,&quot;orderTable&quot;:146,&quot;orderDeck&quot;:149}," calcext:value-type="string">
            <text:p>{"id":"2-14","name":"北条時政","kana":"ほうじょうときまさ","traitText":"剣術","ruleText":"アタッカーになったとき、自分の戦場のイジンとガーディアンをすきなだけ寝かせて発動できる。このターンの間、寝かせた1体につき「アタック+2000」を得る。¶パワー5000以上の間「ダブルプレッシャー」を得る。","legacyText":"1ドローする","imageUrl":"https://one-draw.jp/ijinden/cardlist/002/card/02_014.png","expansion":25,"rarity":1,"type":1,"level":5,"color":1,"term":0,"trait":1,"legacy":4,"orderTable":146,"orderDeck":149},</text:p>
          </table:table-cell>
          <table:table-cell table:number-columns-repeated="16347"/>
        </table:table-row>
        <table:table-row table:style-name="ro2">
          <table:table-cell office:value-type="float" office:value="147" calcext:value-type="float">
            <text:p>147</text:p>
          </table:table-cell>
          <table:table-cell office:value-type="float" office:value="204" calcext:value-type="float">
            <text:p>204</text:p>
          </table:table-cell>
          <table:table-cell office:value-type="string" calcext:value-type="string">
            <text:p>2-15</text:p>
          </table:table-cell>
          <table:table-cell office:value-type="float" office:value="15" calcext:value-type="float">
            <text:p>15</text:p>
          </table:table-cell>
          <table:table-cell office:value-type="string" calcext:value-type="string">
            <text:p>北条時宗</text:p>
          </table:table-cell>
          <table:table-cell office:value-type="string" calcext:value-type="string">
            <text:p>ほうじょうときむね</text:p>
          </table:table-cell>
          <table:table-cell office:value-type="string" calcext:value-type="string">
            <text:p>第２弾ブースターパック</text:p>
          </table:table-cell>
          <table:table-cell table:formula="of:=VLOOKUP([.G148];[$収録番号.$A$1:$収録番号.$B$9];2;0)" office:value-type="float" office:value="25" calcext:value-type="float">
            <text:p>25</text:p>
          </table:table-cell>
          <table:table-cell office:value-type="string" calcext:value-type="string">
            <text:p>N</text:p>
          </table:table-cell>
          <table:table-cell table:formula="of:=VLOOKUP([.I148];[$レアリティ番号.$A$1:$レアリティ番号.$B$4];2;0)" office:value-type="float" office:value="1" calcext:value-type="float">
            <text:p>1</text:p>
          </table:table-cell>
          <table:table-cell office:value-type="string" calcext:value-type="string">
            <text:p>イジン</text:p>
          </table:table-cell>
          <table:table-cell table:formula="of:=VLOOKUP([.K148];[$種類番号.$A$1:$種類番号.$B$4];2;0)" office:value-type="float" office:value="1" calcext:value-type="float">
            <text:p>1</text:p>
          </table:table-cell>
          <table:table-cell office:value-type="string" calcext:value-type="string">
            <text:p>赤</text:p>
          </table:table-cell>
          <table:table-cell table:formula="of:=VLOOKUP([.M148];[$色番号.$A$1:$色番号.$B$10];2;0)" office:value-type="float" office:value="1" calcext:value-type="float">
            <text:p>1</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4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48];[$特性番号.$A$1:$特性番号.$B$8];2;0);0)" office:value-type="float" office:value="0" calcext:value-type="float">
            <text:p>0</text:p>
          </table:table-cell>
          <table:table-cell office:value-type="string" calcext:value-type="string">
            <text:p>即応¶ガーディアンが相手の戦場に4体以上いる間「トリプルプレッシャー」を得る。</text:p>
          </table:table-cell>
          <table:table-cell table:style-name="ce8" table:formula="of:=NA()" office:value-type="string" office:string-value="" calcext:value-type="error">
            <text:p>#N/A</text:p>
          </table:table-cell>
          <table:table-cell table:formula="of:=IFERROR(VLOOKUP([.$V148];[$遺業能力番号.$A$1:$遺業能力番号.$B$9];2;0);0)" office:value-type="float" office:value="0" calcext:value-type="float">
            <text:p>0</text:p>
          </table:table-cell>
          <table:table-cell office:value-type="string" calcext:value-type="string">
            <text:p>https://one-draw.jp/ijinden/cardlist/002/card/02_015.png</text:p>
          </table:table-cell>
          <table:table-cell table:formula="of:=CONCATENATE([$JSON.$A$1];[.$C148];[$JSON.$B$1];[.$E148];[$JSON.$C$1];[.$F148];[$JSON.$D$1];IF(ISNA([.$S148]);&quot;null&quot;;&quot;&quot;&quot;&quot;&amp;[.$S148]&amp;&quot;&quot;&quot;&quot;);[$JSON.$E$1];[.$U148];[$JSON.$F$1];IF(ISNA([.$V148]);&quot;null&quot;;&quot;&quot;&quot;&quot;&amp;[.$V148]&amp;&quot;&quot;&quot;&quot;);[$JSON.$G$1];[.$X148];[$JSON.$H$1];[.$H148];[$JSON.$I$1];[.J148];[$JSON.$J$1];[.$L148];[$JSON.$K$1];[.$O148];[$JSON.$L$1];[.$N148];[$JSON.$M$1];[.$R148];[$JSON.$N$1];[.$T148];[$JSON.$O$1];[.$W148];[$JSON.$P$1];[.$A148];[$JSON.$Q$1];[.$B148];[$JSON.$R$1])" office:value-type="string" office:string-value="{&quot;id&quot;:&quot;2-15&quot;,&quot;name&quot;:&quot;北条時宗&quot;,&quot;kana&quot;:&quot;ほうじょうときむね&quot;,&quot;traitText&quot;:null,&quot;ruleText&quot;:&quot;即応¶ガーディアンが相手の戦場に4体以上いる間「トリプルプレッシャー」を得る。&quot;,&quot;legacyText&quot;:null,&quot;imageUrl&quot;:&quot;https://one-draw.jp/ijinden/cardlist/002/card/02_015.png&quot;,&quot;expansion&quot;:25,&quot;rarity&quot;:1,&quot;type&quot;:1,&quot;level&quot;:7,&quot;color&quot;:1,&quot;term&quot;:0,&quot;trait&quot;:0,&quot;legacy&quot;:0,&quot;orderTable&quot;:147,&quot;orderDeck&quot;:204}," calcext:value-type="string">
            <text:p>{"id":"2-15","name":"北条時宗","kana":"ほうじょうときむね","traitText":null,"ruleText":"即応¶ガーディアンが相手の戦場に4体以上いる間「トリプルプレッシャー」を得る。","legacyText":null,"imageUrl":"https://one-draw.jp/ijinden/cardlist/002/card/02_015.png","expansion":25,"rarity":1,"type":1,"level":7,"color":1,"term":0,"trait":0,"legacy":0,"orderTable":147,"orderDeck":204},</text:p>
          </table:table-cell>
          <table:table-cell table:number-columns-repeated="16347"/>
        </table:table-row>
        <table:table-row table:style-name="ro2">
          <table:table-cell office:value-type="float" office:value="148" calcext:value-type="float">
            <text:p>148</text:p>
          </table:table-cell>
          <table:table-cell office:value-type="float" office:value="37" calcext:value-type="float">
            <text:p>37</text:p>
          </table:table-cell>
          <table:table-cell office:value-type="string" calcext:value-type="string">
            <text:p>2-16</text:p>
          </table:table-cell>
          <table:table-cell office:value-type="float" office:value="16" calcext:value-type="float">
            <text:p>16</text:p>
          </table:table-cell>
          <table:table-cell office:value-type="string" calcext:value-type="string">
            <text:p>シャルル・ド・モンテスキュー</text:p>
          </table:table-cell>
          <table:table-cell office:value-type="string" calcext:value-type="string">
            <text:p>しゃるるどもんてすきゅー</text:p>
          </table:table-cell>
          <table:table-cell office:value-type="string" calcext:value-type="string">
            <text:p>第２弾ブースターパック</text:p>
          </table:table-cell>
          <table:table-cell table:formula="of:=VLOOKUP([.G149];[$収録番号.$A$1:$収録番号.$B$9];2;0)" office:value-type="float" office:value="25" calcext:value-type="float">
            <text:p>25</text:p>
          </table:table-cell>
          <table:table-cell office:value-type="string" calcext:value-type="string">
            <text:p>N</text:p>
          </table:table-cell>
          <table:table-cell table:formula="of:=VLOOKUP([.I149];[$レアリティ番号.$A$1:$レアリティ番号.$B$4];2;0)" office:value-type="float" office:value="1" calcext:value-type="float">
            <text:p>1</text:p>
          </table:table-cell>
          <table:table-cell office:value-type="string" calcext:value-type="string">
            <text:p>イジン</text:p>
          </table:table-cell>
          <table:table-cell table:formula="of:=VLOOKUP([.K149];[$種類番号.$A$1:$種類番号.$B$4];2;0)" office:value-type="float" office:value="1" calcext:value-type="float">
            <text:p>1</text:p>
          </table:table-cell>
          <table:table-cell office:value-type="string" calcext:value-type="string">
            <text:p>青</text:p>
          </table:table-cell>
          <table:table-cell table:formula="of:=VLOOKUP([.M149];[$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49];[$能力語番号.$A$1:$能力語番号.$B$10];2;0);0)" office:value-type="float" office:value="0" calcext:value-type="float">
            <text:p>0</text:p>
          </table:table-cell>
          <table:table-cell office:value-type="string" calcext:value-type="string">
            <text:p>思想</text:p>
          </table:table-cell>
          <table:table-cell table:formula="of:=IFERROR(VLOOKUP([.$S149];[$特性番号.$A$1:$特性番号.$B$8];2;0);0)" office:value-type="float" office:value="8" calcext:value-type="float">
            <text:p>8</text:p>
          </table:table-cell>
          <table:table-cell office:value-type="string" calcext:value-type="string">
            <text:p>相手の戦場に2色以上ある間、自分の戦場の「思想」カードは「能力によって破壊されない」を得る。¶相手の戦場に3色以上ある間、自分の戦場の「思想」カードは「能力によって戦場を離れない」を得る。</text:p>
          </table:table-cell>
          <table:table-cell table:style-name="ce8" office:value-type="string" calcext:value-type="string">
            <text:p>1ドローする</text:p>
          </table:table-cell>
          <table:table-cell table:formula="of:=IFERROR(VLOOKUP([.$V149];[$遺業能力番号.$A$1:$遺業能力番号.$B$9];2;0);0)" office:value-type="float" office:value="4" calcext:value-type="float">
            <text:p>4</text:p>
          </table:table-cell>
          <table:table-cell office:value-type="string" calcext:value-type="string">
            <text:p>https://one-draw.jp/ijinden/cardlist/002/card/02_016.png</text:p>
          </table:table-cell>
          <table:table-cell table:formula="of:=CONCATENATE([$JSON.$A$1];[.$C149];[$JSON.$B$1];[.$E149];[$JSON.$C$1];[.$F149];[$JSON.$D$1];IF(ISNA([.$S149]);&quot;null&quot;;&quot;&quot;&quot;&quot;&amp;[.$S149]&amp;&quot;&quot;&quot;&quot;);[$JSON.$E$1];[.$U149];[$JSON.$F$1];IF(ISNA([.$V149]);&quot;null&quot;;&quot;&quot;&quot;&quot;&amp;[.$V149]&amp;&quot;&quot;&quot;&quot;);[$JSON.$G$1];[.$X149];[$JSON.$H$1];[.$H149];[$JSON.$I$1];[.J149];[$JSON.$J$1];[.$L149];[$JSON.$K$1];[.$O149];[$JSON.$L$1];[.$N149];[$JSON.$M$1];[.$R149];[$JSON.$N$1];[.$T149];[$JSON.$O$1];[.$W149];[$JSON.$P$1];[.$A149];[$JSON.$Q$1];[.$B149];[$JSON.$R$1])" office:value-type="string" office:string-value="{&quot;id&quot;:&quot;2-16&quot;,&quot;name&quot;:&quot;シャルル・ド・モンテスキュー&quot;,&quot;kana&quot;:&quot;しゃるるどもんてすきゅー&quot;,&quot;traitText&quot;:&quot;思想&quot;,&quot;ruleText&quot;:&quot;相手の戦場に2色以上ある間、自分の戦場の「思想」カードは「能力によって破壊されない」を得る。¶相手の戦場に3色以上ある間、自分の戦場の「思想」カードは「能力によって戦場を離れない」を得る。&quot;,&quot;legacyText&quot;:&quot;1ドローする&quot;,&quot;imageUrl&quot;:&quot;https://one-draw.jp/ijinden/cardlist/002/card/02_016.png&quot;,&quot;expansion&quot;:25,&quot;rarity&quot;:1,&quot;type&quot;:1,&quot;level&quot;:2,&quot;color&quot;:2,&quot;term&quot;:0,&quot;trait&quot;:8,&quot;legacy&quot;:4,&quot;orderTable&quot;:148,&quot;orderDeck&quot;:37}," calcext:value-type="string">
            <text:p>{"id":"2-16","name":"シャルル・ド・モンテスキュー","kana":"しゃるるどもんてすきゅー","traitText":"思想","ruleText":"相手の戦場に2色以上ある間、自分の戦場の「思想」カードは「能力によって破壊されない」を得る。¶相手の戦場に3色以上ある間、自分の戦場の「思想」カードは「能力によって戦場を離れない」を得る。","legacyText":"1ドローする","imageUrl":"https://one-draw.jp/ijinden/cardlist/002/card/02_016.png","expansion":25,"rarity":1,"type":1,"level":2,"color":2,"term":0,"trait":8,"legacy":4,"orderTable":148,"orderDeck":37},</text:p>
          </table:table-cell>
          <table:table-cell table:number-columns-repeated="16347"/>
        </table:table-row>
        <table:table-row table:style-name="ro2">
          <table:table-cell office:value-type="float" office:value="149" calcext:value-type="float">
            <text:p>149</text:p>
          </table:table-cell>
          <table:table-cell office:value-type="float" office:value="80" calcext:value-type="float">
            <text:p>80</text:p>
          </table:table-cell>
          <table:table-cell office:value-type="string" calcext:value-type="string">
            <text:p>2-17</text:p>
          </table:table-cell>
          <table:table-cell office:value-type="float" office:value="17" calcext:value-type="float">
            <text:p>17</text:p>
          </table:table-cell>
          <table:table-cell office:value-type="string" calcext:value-type="string">
            <text:p>ジャン＝ジャック・ルソー</text:p>
          </table:table-cell>
          <table:table-cell office:value-type="string" calcext:value-type="string">
            <text:p>じゃんじゃっくるそー</text:p>
          </table:table-cell>
          <table:table-cell office:value-type="string" calcext:value-type="string">
            <text:p>第２弾ブースターパック</text:p>
          </table:table-cell>
          <table:table-cell table:formula="of:=VLOOKUP([.G150];[$収録番号.$A$1:$収録番号.$B$9];2;0)" office:value-type="float" office:value="25" calcext:value-type="float">
            <text:p>25</text:p>
          </table:table-cell>
          <table:table-cell office:value-type="string" calcext:value-type="string">
            <text:p>N</text:p>
          </table:table-cell>
          <table:table-cell table:formula="of:=VLOOKUP([.I150];[$レアリティ番号.$A$1:$レアリティ番号.$B$4];2;0)" office:value-type="float" office:value="1" calcext:value-type="float">
            <text:p>1</text:p>
          </table:table-cell>
          <table:table-cell office:value-type="string" calcext:value-type="string">
            <text:p>イジン</text:p>
          </table:table-cell>
          <table:table-cell table:formula="of:=VLOOKUP([.K150];[$種類番号.$A$1:$種類番号.$B$4];2;0)" office:value-type="float" office:value="1" calcext:value-type="float">
            <text:p>1</text:p>
          </table:table-cell>
          <table:table-cell office:value-type="string" calcext:value-type="string">
            <text:p>青</text:p>
          </table:table-cell>
          <table:table-cell table:formula="of:=VLOOKUP([.M150];[$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50];[$能力語番号.$A$1:$能力語番号.$B$10];2;0);0)" office:value-type="float" office:value="0" calcext:value-type="float">
            <text:p>0</text:p>
          </table:table-cell>
          <table:table-cell office:value-type="string" calcext:value-type="string">
            <text:p>思想</text:p>
          </table:table-cell>
          <table:table-cell table:formula="of:=IFERROR(VLOOKUP([.$S150];[$特性番号.$A$1:$特性番号.$B$8];2;0);0)" office:value-type="float" office:value="8" calcext:value-type="float">
            <text:p>8</text:p>
          </table:table-cell>
          <table:table-cell office:value-type="string" calcext:value-type="string">
            <text:p>戦場に置かれたとき、自分の手札1枚を墓地に置いて、戦場で最も高いパワーを持つイジン1体を破壊する。</text:p>
          </table:table-cell>
          <table:table-cell table:style-name="ce8" office:value-type="string" calcext:value-type="string">
            <text:p>1ドローする</text:p>
          </table:table-cell>
          <table:table-cell table:formula="of:=IFERROR(VLOOKUP([.$V150];[$遺業能力番号.$A$1:$遺業能力番号.$B$9];2;0);0)" office:value-type="float" office:value="4" calcext:value-type="float">
            <text:p>4</text:p>
          </table:table-cell>
          <table:table-cell office:value-type="string" calcext:value-type="string">
            <text:p>https://one-draw.jp/ijinden/cardlist/002/card/02_017.png</text:p>
          </table:table-cell>
          <table:table-cell table:formula="of:=CONCATENATE([$JSON.$A$1];[.$C150];[$JSON.$B$1];[.$E150];[$JSON.$C$1];[.$F150];[$JSON.$D$1];IF(ISNA([.$S150]);&quot;null&quot;;&quot;&quot;&quot;&quot;&amp;[.$S150]&amp;&quot;&quot;&quot;&quot;);[$JSON.$E$1];[.$U150];[$JSON.$F$1];IF(ISNA([.$V150]);&quot;null&quot;;&quot;&quot;&quot;&quot;&amp;[.$V150]&amp;&quot;&quot;&quot;&quot;);[$JSON.$G$1];[.$X150];[$JSON.$H$1];[.$H150];[$JSON.$I$1];[.J150];[$JSON.$J$1];[.$L150];[$JSON.$K$1];[.$O150];[$JSON.$L$1];[.$N150];[$JSON.$M$1];[.$R150];[$JSON.$N$1];[.$T150];[$JSON.$O$1];[.$W150];[$JSON.$P$1];[.$A150];[$JSON.$Q$1];[.$B150];[$JSON.$R$1])" office:value-type="string" office:string-value="{&quot;id&quot;:&quot;2-17&quot;,&quot;name&quot;:&quot;ジャン＝ジャック・ルソー&quot;,&quot;kana&quot;:&quot;じゃんじゃっくるそー&quot;,&quot;traitText&quot;:&quot;思想&quot;,&quot;ruleText&quot;:&quot;戦場に置かれたとき、自分の手札1枚を墓地に置いて、戦場で最も高いパワーを持つイジン1体を破壊する。&quot;,&quot;legacyText&quot;:&quot;1ドローする&quot;,&quot;imageUrl&quot;:&quot;https://one-draw.jp/ijinden/cardlist/002/card/02_017.png&quot;,&quot;expansion&quot;:25,&quot;rarity&quot;:1,&quot;type&quot;:1,&quot;level&quot;:3,&quot;color&quot;:2,&quot;term&quot;:0,&quot;trait&quot;:8,&quot;legacy&quot;:4,&quot;orderTable&quot;:149,&quot;orderDeck&quot;:80}," calcext:value-type="string">
            <text:p>{"id":"2-17","name":"ジャン＝ジャック・ルソー","kana":"じゃんじゃっくるそー","traitText":"思想","ruleText":"戦場に置かれたとき、自分の手札1枚を墓地に置いて、戦場で最も高いパワーを持つイジン1体を破壊する。","legacyText":"1ドローする","imageUrl":"https://one-draw.jp/ijinden/cardlist/002/card/02_017.png","expansion":25,"rarity":1,"type":1,"level":3,"color":2,"term":0,"trait":8,"legacy":4,"orderTable":149,"orderDeck":80},</text:p>
          </table:table-cell>
          <table:table-cell table:number-columns-repeated="16347"/>
        </table:table-row>
        <table:table-row table:style-name="ro2">
          <table:table-cell office:value-type="float" office:value="150" calcext:value-type="float">
            <text:p>150</text:p>
          </table:table-cell>
          <table:table-cell office:value-type="float" office:value="38" calcext:value-type="float">
            <text:p>38</text:p>
          </table:table-cell>
          <table:table-cell office:value-type="string" calcext:value-type="string">
            <text:p>2-18</text:p>
          </table:table-cell>
          <table:table-cell office:value-type="float" office:value="18" calcext:value-type="float">
            <text:p>18</text:p>
          </table:table-cell>
          <table:table-cell office:value-type="string" calcext:value-type="string">
            <text:p>エカチェリーナ2世</text:p>
          </table:table-cell>
          <table:table-cell office:value-type="string" calcext:value-type="string">
            <text:p>えかちぇりーなにせい</text:p>
          </table:table-cell>
          <table:table-cell office:value-type="string" calcext:value-type="string">
            <text:p>第２弾ブースターパック</text:p>
          </table:table-cell>
          <table:table-cell table:formula="of:=VLOOKUP([.G151];[$収録番号.$A$1:$収録番号.$B$9];2;0)" office:value-type="float" office:value="25" calcext:value-type="float">
            <text:p>25</text:p>
          </table:table-cell>
          <table:table-cell office:value-type="string" calcext:value-type="string">
            <text:p>R</text:p>
          </table:table-cell>
          <table:table-cell table:formula="of:=VLOOKUP([.I151];[$レアリティ番号.$A$1:$レアリティ番号.$B$4];2;0)" office:value-type="float" office:value="2" calcext:value-type="float">
            <text:p>2</text:p>
          </table:table-cell>
          <table:table-cell office:value-type="string" calcext:value-type="string">
            <text:p>イジン</text:p>
          </table:table-cell>
          <table:table-cell table:formula="of:=VLOOKUP([.K151];[$種類番号.$A$1:$種類番号.$B$4];2;0)" office:value-type="float" office:value="1" calcext:value-type="float">
            <text:p>1</text:p>
          </table:table-cell>
          <table:table-cell office:value-type="string" calcext:value-type="string">
            <text:p>青</text:p>
          </table:table-cell>
          <table:table-cell table:formula="of:=VLOOKUP([.M151];[$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5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51];[$特性番号.$A$1:$特性番号.$B$8];2;0);0)" office:value-type="float" office:value="0" calcext:value-type="float">
            <text:p>0</text:p>
          </table:table-cell>
          <table:table-cell office:value-type="string" calcext:value-type="string">
            <text:p>マリョクが相手の魔力ゾーンに3つ以上ある間、相手は表向きでマリョク配置できない。¶相手の魔力ゾーンにあるマリョク1つにつき「パワー+1000」を得る。</text:p>
          </table:table-cell>
          <table:table-cell table:style-name="ce8" office:value-type="string" calcext:value-type="string">
            <text:p>1ドローする</text:p>
          </table:table-cell>
          <table:table-cell table:formula="of:=IFERROR(VLOOKUP([.$V151];[$遺業能力番号.$A$1:$遺業能力番号.$B$9];2;0);0)" office:value-type="float" office:value="4" calcext:value-type="float">
            <text:p>4</text:p>
          </table:table-cell>
          <table:table-cell office:value-type="string" calcext:value-type="string">
            <text:p>https://one-draw.jp/ijinden/cardlist/002/card/02_018.png</text:p>
          </table:table-cell>
          <table:table-cell table:formula="of:=CONCATENATE([$JSON.$A$1];[.$C151];[$JSON.$B$1];[.$E151];[$JSON.$C$1];[.$F151];[$JSON.$D$1];IF(ISNA([.$S151]);&quot;null&quot;;&quot;&quot;&quot;&quot;&amp;[.$S151]&amp;&quot;&quot;&quot;&quot;);[$JSON.$E$1];[.$U151];[$JSON.$F$1];IF(ISNA([.$V151]);&quot;null&quot;;&quot;&quot;&quot;&quot;&amp;[.$V151]&amp;&quot;&quot;&quot;&quot;);[$JSON.$G$1];[.$X151];[$JSON.$H$1];[.$H151];[$JSON.$I$1];[.J151];[$JSON.$J$1];[.$L151];[$JSON.$K$1];[.$O151];[$JSON.$L$1];[.$N151];[$JSON.$M$1];[.$R151];[$JSON.$N$1];[.$T151];[$JSON.$O$1];[.$W151];[$JSON.$P$1];[.$A151];[$JSON.$Q$1];[.$B151];[$JSON.$R$1])" office:value-type="string" office:string-value="{&quot;id&quot;:&quot;2-18&quot;,&quot;name&quot;:&quot;エカチェリーナ2世&quot;,&quot;kana&quot;:&quot;えかちぇりーなにせい&quot;,&quot;traitText&quot;:null,&quot;ruleText&quot;:&quot;マリョクが相手の魔力ゾーンに3つ以上ある間、相手は表向きでマリョク配置できない。¶相手の魔力ゾーンにあるマリョク1つにつき「パワー+1000」を得る。&quot;,&quot;legacyText&quot;:&quot;1ドローする&quot;,&quot;imageUrl&quot;:&quot;https://one-draw.jp/ijinden/cardlist/002/card/02_018.png&quot;,&quot;expansion&quot;:25,&quot;rarity&quot;:2,&quot;type&quot;:1,&quot;level&quot;:2,&quot;color&quot;:2,&quot;term&quot;:0,&quot;trait&quot;:0,&quot;legacy&quot;:4,&quot;orderTable&quot;:150,&quot;orderDeck&quot;:38}," calcext:value-type="string">
            <text:p>{"id":"2-18","name":"エカチェリーナ2世","kana":"えかちぇりーなにせい","traitText":null,"ruleText":"マリョクが相手の魔力ゾーンに3つ以上ある間、相手は表向きでマリョク配置できない。¶相手の魔力ゾーンにあるマリョク1つにつき「パワー+1000」を得る。","legacyText":"1ドローする","imageUrl":"https://one-draw.jp/ijinden/cardlist/002/card/02_018.png","expansion":25,"rarity":2,"type":1,"level":2,"color":2,"term":0,"trait":0,"legacy":4,"orderTable":150,"orderDeck":38},</text:p>
          </table:table-cell>
          <table:table-cell table:number-columns-repeated="16347"/>
        </table:table-row>
        <table:table-row table:style-name="ro2">
          <table:table-cell office:value-type="float" office:value="151" calcext:value-type="float">
            <text:p>151</text:p>
          </table:table-cell>
          <table:table-cell office:value-type="float" office:value="8" calcext:value-type="float">
            <text:p>8</text:p>
          </table:table-cell>
          <table:table-cell office:value-type="string" calcext:value-type="string">
            <text:p>2-19</text:p>
          </table:table-cell>
          <table:table-cell office:value-type="float" office:value="19" calcext:value-type="float">
            <text:p>19</text:p>
          </table:table-cell>
          <table:table-cell office:value-type="string" calcext:value-type="string">
            <text:p>ジョン・ロック</text:p>
          </table:table-cell>
          <table:table-cell office:value-type="string" calcext:value-type="string">
            <text:p>じょんろっく</text:p>
          </table:table-cell>
          <table:table-cell office:value-type="string" calcext:value-type="string">
            <text:p>第２弾ブースターパック</text:p>
          </table:table-cell>
          <table:table-cell table:formula="of:=VLOOKUP([.G152];[$収録番号.$A$1:$収録番号.$B$9];2;0)" office:value-type="float" office:value="25" calcext:value-type="float">
            <text:p>25</text:p>
          </table:table-cell>
          <table:table-cell office:value-type="string" calcext:value-type="string">
            <text:p>N</text:p>
          </table:table-cell>
          <table:table-cell table:formula="of:=VLOOKUP([.I152];[$レアリティ番号.$A$1:$レアリティ番号.$B$4];2;0)" office:value-type="float" office:value="1" calcext:value-type="float">
            <text:p>1</text:p>
          </table:table-cell>
          <table:table-cell office:value-type="string" calcext:value-type="string">
            <text:p>イジン</text:p>
          </table:table-cell>
          <table:table-cell table:formula="of:=VLOOKUP([.K152];[$種類番号.$A$1:$種類番号.$B$4];2;0)" office:value-type="float" office:value="1" calcext:value-type="float">
            <text:p>1</text:p>
          </table:table-cell>
          <table:table-cell office:value-type="string" calcext:value-type="string">
            <text:p>青</text:p>
          </table:table-cell>
          <table:table-cell table:formula="of:=VLOOKUP([.M152];[$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52];[$能力語番号.$A$1:$能力語番号.$B$10];2;0);0)" office:value-type="float" office:value="0" calcext:value-type="float">
            <text:p>0</text:p>
          </table:table-cell>
          <table:table-cell office:value-type="string" calcext:value-type="string">
            <text:p>思想</text:p>
          </table:table-cell>
          <table:table-cell table:formula="of:=IFERROR(VLOOKUP([.$S152];[$特性番号.$A$1:$特性番号.$B$8];2;0);0)" office:value-type="float" office:value="8" calcext:value-type="float">
            <text:p>8</text:p>
          </table:table-cell>
          <table:table-cell office:value-type="string" calcext:value-type="string">
            <text:p>自分の戦場のガーディアンが破壊されるたびに発動できる。アタッカー1体を手札に戻す。</text:p>
          </table:table-cell>
          <table:table-cell table:style-name="ce8" office:value-type="string" calcext:value-type="string">
            <text:p>1ドローする</text:p>
          </table:table-cell>
          <table:table-cell table:formula="of:=IFERROR(VLOOKUP([.$V152];[$遺業能力番号.$A$1:$遺業能力番号.$B$9];2;0);0)" office:value-type="float" office:value="4" calcext:value-type="float">
            <text:p>4</text:p>
          </table:table-cell>
          <table:table-cell office:value-type="string" calcext:value-type="string">
            <text:p>https://one-draw.jp/ijinden/cardlist/002/card/02_019.png</text:p>
          </table:table-cell>
          <table:table-cell table:formula="of:=CONCATENATE([$JSON.$A$1];[.$C152];[$JSON.$B$1];[.$E152];[$JSON.$C$1];[.$F152];[$JSON.$D$1];IF(ISNA([.$S152]);&quot;null&quot;;&quot;&quot;&quot;&quot;&amp;[.$S152]&amp;&quot;&quot;&quot;&quot;);[$JSON.$E$1];[.$U152];[$JSON.$F$1];IF(ISNA([.$V152]);&quot;null&quot;;&quot;&quot;&quot;&quot;&amp;[.$V152]&amp;&quot;&quot;&quot;&quot;);[$JSON.$G$1];[.$X152];[$JSON.$H$1];[.$H152];[$JSON.$I$1];[.J152];[$JSON.$J$1];[.$L152];[$JSON.$K$1];[.$O152];[$JSON.$L$1];[.$N152];[$JSON.$M$1];[.$R152];[$JSON.$N$1];[.$T152];[$JSON.$O$1];[.$W152];[$JSON.$P$1];[.$A152];[$JSON.$Q$1];[.$B152];[$JSON.$R$1])" office:value-type="string" office:string-value="{&quot;id&quot;:&quot;2-19&quot;,&quot;name&quot;:&quot;ジョン・ロック&quot;,&quot;kana&quot;:&quot;じょんろっく&quot;,&quot;traitText&quot;:&quot;思想&quot;,&quot;ruleText&quot;:&quot;自分の戦場のガーディアンが破壊されるたびに発動できる。アタッカー1体を手札に戻す。&quot;,&quot;legacyText&quot;:&quot;1ドローする&quot;,&quot;imageUrl&quot;:&quot;https://one-draw.jp/ijinden/cardlist/002/card/02_019.png&quot;,&quot;expansion&quot;:25,&quot;rarity&quot;:1,&quot;type&quot;:1,&quot;level&quot;:1,&quot;color&quot;:2,&quot;term&quot;:0,&quot;trait&quot;:8,&quot;legacy&quot;:4,&quot;orderTable&quot;:151,&quot;orderDeck&quot;:8}," calcext:value-type="string">
            <text:p>{"id":"2-19","name":"ジョン・ロック","kana":"じょんろっく","traitText":"思想","ruleText":"自分の戦場のガーディアンが破壊されるたびに発動できる。アタッカー1体を手札に戻す。","legacyText":"1ドローする","imageUrl":"https://one-draw.jp/ijinden/cardlist/002/card/02_019.png","expansion":25,"rarity":1,"type":1,"level":1,"color":2,"term":0,"trait":8,"legacy":4,"orderTable":151,"orderDeck":8},</text:p>
          </table:table-cell>
          <table:table-cell table:number-columns-repeated="16347"/>
        </table:table-row>
        <table:table-row table:style-name="ro2">
          <table:table-cell office:value-type="float" office:value="152" calcext:value-type="float">
            <text:p>152</text:p>
          </table:table-cell>
          <table:table-cell office:value-type="float" office:value="39" calcext:value-type="float">
            <text:p>39</text:p>
          </table:table-cell>
          <table:table-cell office:value-type="string" calcext:value-type="string">
            <text:p>2-20</text:p>
          </table:table-cell>
          <table:table-cell office:value-type="float" office:value="20" calcext:value-type="float">
            <text:p>20</text:p>
          </table:table-cell>
          <table:table-cell office:value-type="string" calcext:value-type="string">
            <text:p>洪秀全</text:p>
          </table:table-cell>
          <table:table-cell office:value-type="string" calcext:value-type="string">
            <text:p>こうしゅうぜん</text:p>
          </table:table-cell>
          <table:table-cell office:value-type="string" calcext:value-type="string">
            <text:p>第２弾ブースターパック</text:p>
          </table:table-cell>
          <table:table-cell table:formula="of:=VLOOKUP([.G153];[$収録番号.$A$1:$収録番号.$B$9];2;0)" office:value-type="float" office:value="25" calcext:value-type="float">
            <text:p>25</text:p>
          </table:table-cell>
          <table:table-cell office:value-type="string" calcext:value-type="string">
            <text:p>N</text:p>
          </table:table-cell>
          <table:table-cell table:formula="of:=VLOOKUP([.I153];[$レアリティ番号.$A$1:$レアリティ番号.$B$4];2;0)" office:value-type="float" office:value="1" calcext:value-type="float">
            <text:p>1</text:p>
          </table:table-cell>
          <table:table-cell office:value-type="string" calcext:value-type="string">
            <text:p>イジン</text:p>
          </table:table-cell>
          <table:table-cell table:formula="of:=VLOOKUP([.K153];[$種類番号.$A$1:$種類番号.$B$4];2;0)" office:value-type="float" office:value="1" calcext:value-type="float">
            <text:p>1</text:p>
          </table:table-cell>
          <table:table-cell office:value-type="string" calcext:value-type="string">
            <text:p>青</text:p>
          </table:table-cell>
          <table:table-cell table:formula="of:=VLOOKUP([.M153];[$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徴募</text:p>
          </table:table-cell>
          <table:table-cell table:formula="of:=IFERROR(VLOOKUP([.$Q153];[$能力語番号.$A$1:$能力語番号.$B$10];2;0);0)" office:value-type="float" office:value="8" calcext:value-type="float">
            <text:p>8</text:p>
          </table:table-cell>
          <table:table-cell table:formula="of:=NA()" office:value-type="string" office:string-value="" calcext:value-type="error">
            <text:p>#N/A</text:p>
          </table:table-cell>
          <table:table-cell table:formula="of:=IFERROR(VLOOKUP([.$S153];[$特性番号.$A$1:$特性番号.$B$8];2;0);0)" office:value-type="float" office:value="0" calcext:value-type="float">
            <text:p>0</text:p>
          </table:table-cell>
          <table:table-cell office:value-type="string" calcext:value-type="string">
            <text:p>徴募 - この能力は墓地でも発動する。自分のエンドフェイズが開始したとき、このターンにアタッカーが破壊されているなら発動できる。相手の手札を見てマホウかハイケイ1つを墓地に置く。¶ブロック+2000</text:p>
          </table:table-cell>
          <table:table-cell table:style-name="ce8" office:value-type="string" calcext:value-type="string">
            <text:p>1ドローする</text:p>
          </table:table-cell>
          <table:table-cell table:formula="of:=IFERROR(VLOOKUP([.$V153];[$遺業能力番号.$A$1:$遺業能力番号.$B$9];2;0);0)" office:value-type="float" office:value="4" calcext:value-type="float">
            <text:p>4</text:p>
          </table:table-cell>
          <table:table-cell office:value-type="string" calcext:value-type="string">
            <text:p>https://one-draw.jp/ijinden/cardlist/002/card/02_020.png</text:p>
          </table:table-cell>
          <table:table-cell table:formula="of:=CONCATENATE([$JSON.$A$1];[.$C153];[$JSON.$B$1];[.$E153];[$JSON.$C$1];[.$F153];[$JSON.$D$1];IF(ISNA([.$S153]);&quot;null&quot;;&quot;&quot;&quot;&quot;&amp;[.$S153]&amp;&quot;&quot;&quot;&quot;);[$JSON.$E$1];[.$U153];[$JSON.$F$1];IF(ISNA([.$V153]);&quot;null&quot;;&quot;&quot;&quot;&quot;&amp;[.$V153]&amp;&quot;&quot;&quot;&quot;);[$JSON.$G$1];[.$X153];[$JSON.$H$1];[.$H153];[$JSON.$I$1];[.J153];[$JSON.$J$1];[.$L153];[$JSON.$K$1];[.$O153];[$JSON.$L$1];[.$N153];[$JSON.$M$1];[.$R153];[$JSON.$N$1];[.$T153];[$JSON.$O$1];[.$W153];[$JSON.$P$1];[.$A153];[$JSON.$Q$1];[.$B153];[$JSON.$R$1])" office:value-type="string" office:string-value="{&quot;id&quot;:&quot;2-20&quot;,&quot;name&quot;:&quot;洪秀全&quot;,&quot;kana&quot;:&quot;こうしゅうぜん&quot;,&quot;traitText&quot;:null,&quot;ruleText&quot;:&quot;徴募 - この能力は墓地でも発動する。自分のエンドフェイズが開始したとき、このターンにアタッカーが破壊されているなら発動できる。相手の手札を見てマホウかハイケイ1つを墓地に置く。¶ブロック+2000&quot;,&quot;legacyText&quot;:&quot;1ドローする&quot;,&quot;imageUrl&quot;:&quot;https://one-draw.jp/ijinden/cardlist/002/card/02_020.png&quot;,&quot;expansion&quot;:25,&quot;rarity&quot;:1,&quot;type&quot;:1,&quot;level&quot;:2,&quot;color&quot;:2,&quot;term&quot;:8,&quot;trait&quot;:0,&quot;legacy&quot;:4,&quot;orderTable&quot;:152,&quot;orderDeck&quot;:39}," calcext:value-type="string">
            <text:p>{"id":"2-20","name":"洪秀全","kana":"こうしゅうぜん","traitText":null,"ruleText":"徴募 - この能力は墓地でも発動する。自分のエンドフェイズが開始したとき、このターンにアタッカーが破壊されているなら発動できる。相手の手札を見てマホウかハイケイ1つを墓地に置く。¶ブロック+2000","legacyText":"1ドローする","imageUrl":"https://one-draw.jp/ijinden/cardlist/002/card/02_020.png","expansion":25,"rarity":1,"type":1,"level":2,"color":2,"term":8,"trait":0,"legacy":4,"orderTable":152,"orderDeck":39},</text:p>
          </table:table-cell>
          <table:table-cell table:number-columns-repeated="16347"/>
        </table:table-row>
        <table:table-row table:style-name="ro2">
          <table:table-cell office:value-type="float" office:value="153" calcext:value-type="float">
            <text:p>153</text:p>
          </table:table-cell>
          <table:table-cell office:value-type="float" office:value="81" calcext:value-type="float">
            <text:p>81</text:p>
          </table:table-cell>
          <table:table-cell office:value-type="string" calcext:value-type="string">
            <text:p>2-21</text:p>
          </table:table-cell>
          <table:table-cell office:value-type="float" office:value="21" calcext:value-type="float">
            <text:p>21</text:p>
          </table:table-cell>
          <table:table-cell office:value-type="string" calcext:value-type="string">
            <text:p>ジェームズ＝ワット</text:p>
          </table:table-cell>
          <table:table-cell office:value-type="string" calcext:value-type="string">
            <text:p>じぇーむずわっと</text:p>
          </table:table-cell>
          <table:table-cell office:value-type="string" calcext:value-type="string">
            <text:p>第２弾ブースターパック</text:p>
          </table:table-cell>
          <table:table-cell table:formula="of:=VLOOKUP([.G154];[$収録番号.$A$1:$収録番号.$B$9];2;0)" office:value-type="float" office:value="25" calcext:value-type="float">
            <text:p>25</text:p>
          </table:table-cell>
          <table:table-cell office:value-type="string" calcext:value-type="string">
            <text:p>R</text:p>
          </table:table-cell>
          <table:table-cell table:formula="of:=VLOOKUP([.I154];[$レアリティ番号.$A$1:$レアリティ番号.$B$4];2;0)" office:value-type="float" office:value="2" calcext:value-type="float">
            <text:p>2</text:p>
          </table:table-cell>
          <table:table-cell office:value-type="string" calcext:value-type="string">
            <text:p>イジン</text:p>
          </table:table-cell>
          <table:table-cell table:formula="of:=VLOOKUP([.K154];[$種類番号.$A$1:$種類番号.$B$4];2;0)" office:value-type="float" office:value="1" calcext:value-type="float">
            <text:p>1</text:p>
          </table:table-cell>
          <table:table-cell office:value-type="string" calcext:value-type="string">
            <text:p>青</text:p>
          </table:table-cell>
          <table:table-cell table:formula="of:=VLOOKUP([.M154];[$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5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54];[$特性番号.$A$1:$特性番号.$B$8];2;0);0)" office:value-type="float" office:value="0" calcext:value-type="float">
            <text:p>0</text:p>
          </table:table-cell>
          <table:table-cell office:value-type="string" calcext:value-type="string">
            <text:p>自分のメインフェイズが開始したとき、自分の魔力ゾーンの『ストーン』マリョクが1つだけならマリョク配置権+1する。ちょうど2つならイジン召喚権+1する。3つ以上なら1ドローする。</text:p>
          </table:table-cell>
          <table:table-cell table:style-name="ce8" office:value-type="string" calcext:value-type="string">
            <text:p>反魂</text:p>
          </table:table-cell>
          <table:table-cell table:formula="of:=IFERROR(VLOOKUP([.$V154];[$遺業能力番号.$A$1:$遺業能力番号.$B$9];2;0);0)" office:value-type="float" office:value="6" calcext:value-type="float">
            <text:p>6</text:p>
          </table:table-cell>
          <table:table-cell office:value-type="string" calcext:value-type="string">
            <text:p>https://one-draw.jp/ijinden/cardlist/002/card/02_021.png</text:p>
          </table:table-cell>
          <table:table-cell table:formula="of:=CONCATENATE([$JSON.$A$1];[.$C154];[$JSON.$B$1];[.$E154];[$JSON.$C$1];[.$F154];[$JSON.$D$1];IF(ISNA([.$S154]);&quot;null&quot;;&quot;&quot;&quot;&quot;&amp;[.$S154]&amp;&quot;&quot;&quot;&quot;);[$JSON.$E$1];[.$U154];[$JSON.$F$1];IF(ISNA([.$V154]);&quot;null&quot;;&quot;&quot;&quot;&quot;&amp;[.$V154]&amp;&quot;&quot;&quot;&quot;);[$JSON.$G$1];[.$X154];[$JSON.$H$1];[.$H154];[$JSON.$I$1];[.J154];[$JSON.$J$1];[.$L154];[$JSON.$K$1];[.$O154];[$JSON.$L$1];[.$N154];[$JSON.$M$1];[.$R154];[$JSON.$N$1];[.$T154];[$JSON.$O$1];[.$W154];[$JSON.$P$1];[.$A154];[$JSON.$Q$1];[.$B154];[$JSON.$R$1])" office:value-type="string" office:string-value="{&quot;id&quot;:&quot;2-21&quot;,&quot;name&quot;:&quot;ジェームズ＝ワット&quot;,&quot;kana&quot;:&quot;じぇーむずわっと&quot;,&quot;traitText&quot;:null,&quot;ruleText&quot;:&quot;自分のメインフェイズが開始したとき、自分の魔力ゾーンの『ストーン』マリョクが1つだけならマリョク配置権+1する。ちょうど2つならイジン召喚権+1する。3つ以上なら1ドローする。&quot;,&quot;legacyText&quot;:&quot;反魂&quot;,&quot;imageUrl&quot;:&quot;https://one-draw.jp/ijinden/cardlist/002/card/02_021.png&quot;,&quot;expansion&quot;:25,&quot;rarity&quot;:2,&quot;type&quot;:1,&quot;level&quot;:3,&quot;color&quot;:2,&quot;term&quot;:0,&quot;trait&quot;:0,&quot;legacy&quot;:6,&quot;orderTable&quot;:153,&quot;orderDeck&quot;:81}," calcext:value-type="string">
            <text:p>{"id":"2-21","name":"ジェームズ＝ワット","kana":"じぇーむずわっと","traitText":null,"ruleText":"自分のメインフェイズが開始したとき、自分の魔力ゾーンの『ストーン』マリョクが1つだけならマリョク配置権+1する。ちょうど2つならイジン召喚権+1する。3つ以上なら1ドローする。","legacyText":"反魂","imageUrl":"https://one-draw.jp/ijinden/cardlist/002/card/02_021.png","expansion":25,"rarity":2,"type":1,"level":3,"color":2,"term":0,"trait":0,"legacy":6,"orderTable":153,"orderDeck":81},</text:p>
          </table:table-cell>
          <table:table-cell table:number-columns-repeated="16347"/>
        </table:table-row>
        <table:table-row table:style-name="ro2">
          <table:table-cell office:value-type="float" office:value="154" calcext:value-type="float">
            <text:p>154</text:p>
          </table:table-cell>
          <table:table-cell office:value-type="float" office:value="120" calcext:value-type="float">
            <text:p>120</text:p>
          </table:table-cell>
          <table:table-cell office:value-type="string" calcext:value-type="string">
            <text:p>2-22</text:p>
          </table:table-cell>
          <table:table-cell office:value-type="float" office:value="22" calcext:value-type="float">
            <text:p>22</text:p>
          </table:table-cell>
          <table:table-cell office:value-type="string" calcext:value-type="string">
            <text:p>日蓮</text:p>
          </table:table-cell>
          <table:table-cell office:value-type="string" calcext:value-type="string">
            <text:p>にちれん</text:p>
          </table:table-cell>
          <table:table-cell office:value-type="string" calcext:value-type="string">
            <text:p>第２弾ブースターパック</text:p>
          </table:table-cell>
          <table:table-cell table:formula="of:=VLOOKUP([.G155];[$収録番号.$A$1:$収録番号.$B$9];2;0)" office:value-type="float" office:value="25" calcext:value-type="float">
            <text:p>25</text:p>
          </table:table-cell>
          <table:table-cell office:value-type="string" calcext:value-type="string">
            <text:p>N</text:p>
          </table:table-cell>
          <table:table-cell table:formula="of:=VLOOKUP([.I155];[$レアリティ番号.$A$1:$レアリティ番号.$B$4];2;0)" office:value-type="float" office:value="1" calcext:value-type="float">
            <text:p>1</text:p>
          </table:table-cell>
          <table:table-cell office:value-type="string" calcext:value-type="string">
            <text:p>イジン</text:p>
          </table:table-cell>
          <table:table-cell table:formula="of:=VLOOKUP([.K155];[$種類番号.$A$1:$種類番号.$B$4];2;0)" office:value-type="float" office:value="1" calcext:value-type="float">
            <text:p>1</text:p>
          </table:table-cell>
          <table:table-cell office:value-type="string" calcext:value-type="string">
            <text:p>青</text:p>
          </table:table-cell>
          <table:table-cell table:formula="of:=VLOOKUP([.M155];[$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office:value-type="string" calcext:value-type="string">
            <text:p>航海</text:p>
          </table:table-cell>
          <table:table-cell table:formula="of:=IFERROR(VLOOKUP([.$Q155];[$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155];[$特性番号.$A$1:$特性番号.$B$8];2;0);0)" office:value-type="float" office:value="0" calcext:value-type="float">
            <text:p>0</text:p>
          </table:table-cell>
          <table:table-cell office:value-type="string" calcext:value-type="string">
            <text:p>航海 - アタッカーになったとき、相手の手札を見てマホウ1つを墓地に置く。それができないなら、このイジンを手札に戻す。¶破壊されたとき、相手の手札を見てマホウ1つを墓地に置く。それができないなら、このイジンを手札に戻す。</text:p>
          </table:table-cell>
          <table:table-cell table:style-name="ce8" table:formula="of:=NA()" office:value-type="string" office:string-value="" calcext:value-type="error">
            <text:p>#N/A</text:p>
          </table:table-cell>
          <table:table-cell table:formula="of:=IFERROR(VLOOKUP([.$V155];[$遺業能力番号.$A$1:$遺業能力番号.$B$9];2;0);0)" office:value-type="float" office:value="0" calcext:value-type="float">
            <text:p>0</text:p>
          </table:table-cell>
          <table:table-cell office:value-type="string" calcext:value-type="string">
            <text:p>https://one-draw.jp/ijinden/cardlist/002/card/02_022.png</text:p>
          </table:table-cell>
          <table:table-cell table:formula="of:=CONCATENATE([$JSON.$A$1];[.$C155];[$JSON.$B$1];[.$E155];[$JSON.$C$1];[.$F155];[$JSON.$D$1];IF(ISNA([.$S155]);&quot;null&quot;;&quot;&quot;&quot;&quot;&amp;[.$S155]&amp;&quot;&quot;&quot;&quot;);[$JSON.$E$1];[.$U155];[$JSON.$F$1];IF(ISNA([.$V155]);&quot;null&quot;;&quot;&quot;&quot;&quot;&amp;[.$V155]&amp;&quot;&quot;&quot;&quot;);[$JSON.$G$1];[.$X155];[$JSON.$H$1];[.$H155];[$JSON.$I$1];[.J155];[$JSON.$J$1];[.$L155];[$JSON.$K$1];[.$O155];[$JSON.$L$1];[.$N155];[$JSON.$M$1];[.$R155];[$JSON.$N$1];[.$T155];[$JSON.$O$1];[.$W155];[$JSON.$P$1];[.$A155];[$JSON.$Q$1];[.$B155];[$JSON.$R$1])" office:value-type="string" office:string-value="{&quot;id&quot;:&quot;2-22&quot;,&quot;name&quot;:&quot;日蓮&quot;,&quot;kana&quot;:&quot;にちれん&quot;,&quot;traitText&quot;:null,&quot;ruleText&quot;:&quot;航海 - アタッカーになったとき、相手の手札を見てマホウ1つを墓地に置く。それができないなら、このイジンを手札に戻す。¶破壊されたとき、相手の手札を見てマホウ1つを墓地に置く。それができないなら、このイジンを手札に戻す。&quot;,&quot;legacyText&quot;:null,&quot;imageUrl&quot;:&quot;https://one-draw.jp/ijinden/cardlist/002/card/02_022.png&quot;,&quot;expansion&quot;:25,&quot;rarity&quot;:1,&quot;type&quot;:1,&quot;level&quot;:4,&quot;color&quot;:2,&quot;term&quot;:1,&quot;trait&quot;:0,&quot;legacy&quot;:0,&quot;orderTable&quot;:154,&quot;orderDeck&quot;:120}," calcext:value-type="string">
            <text:p>{"id":"2-22","name":"日蓮","kana":"にちれん","traitText":null,"ruleText":"航海 - アタッカーになったとき、相手の手札を見てマホウ1つを墓地に置く。それができないなら、このイジンを手札に戻す。¶破壊されたとき、相手の手札を見てマホウ1つを墓地に置く。それができないなら、このイジンを手札に戻す。","legacyText":null,"imageUrl":"https://one-draw.jp/ijinden/cardlist/002/card/02_022.png","expansion":25,"rarity":1,"type":1,"level":4,"color":2,"term":1,"trait":0,"legacy":0,"orderTable":154,"orderDeck":120},</text:p>
          </table:table-cell>
          <table:table-cell table:number-columns-repeated="16347"/>
        </table:table-row>
        <table:table-row table:style-name="ro2">
          <table:table-cell office:value-type="float" office:value="155" calcext:value-type="float">
            <text:p>155</text:p>
          </table:table-cell>
          <table:table-cell office:value-type="float" office:value="205" calcext:value-type="float">
            <text:p>205</text:p>
          </table:table-cell>
          <table:table-cell office:value-type="string" calcext:value-type="string">
            <text:p>2-23</text:p>
          </table:table-cell>
          <table:table-cell office:value-type="float" office:value="23" calcext:value-type="float">
            <text:p>23</text:p>
          </table:table-cell>
          <table:table-cell office:value-type="string" calcext:value-type="string">
            <text:p>李舜臣</text:p>
          </table:table-cell>
          <table:table-cell office:value-type="string" calcext:value-type="string">
            <text:p>りしゅんしん</text:p>
          </table:table-cell>
          <table:table-cell office:value-type="string" calcext:value-type="string">
            <text:p>第２弾ブースターパック</text:p>
          </table:table-cell>
          <table:table-cell table:formula="of:=VLOOKUP([.G156];[$収録番号.$A$1:$収録番号.$B$9];2;0)" office:value-type="float" office:value="25" calcext:value-type="float">
            <text:p>25</text:p>
          </table:table-cell>
          <table:table-cell office:value-type="string" calcext:value-type="string">
            <text:p>N</text:p>
          </table:table-cell>
          <table:table-cell table:formula="of:=VLOOKUP([.I156];[$レアリティ番号.$A$1:$レアリティ番号.$B$4];2;0)" office:value-type="float" office:value="1" calcext:value-type="float">
            <text:p>1</text:p>
          </table:table-cell>
          <table:table-cell office:value-type="string" calcext:value-type="string">
            <text:p>イジン</text:p>
          </table:table-cell>
          <table:table-cell table:formula="of:=VLOOKUP([.K156];[$種類番号.$A$1:$種類番号.$B$4];2;0)" office:value-type="float" office:value="1" calcext:value-type="float">
            <text:p>1</text:p>
          </table:table-cell>
          <table:table-cell office:value-type="string" calcext:value-type="string">
            <text:p>青</text:p>
          </table:table-cell>
          <table:table-cell table:formula="of:=VLOOKUP([.M156];[$色番号.$A$1:$色番号.$B$10];2;0)" office:value-type="float" office:value="2" calcext:value-type="float">
            <text:p>2</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5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56];[$特性番号.$A$1:$特性番号.$B$8];2;0);0)" office:value-type="float" office:value="0" calcext:value-type="float">
            <text:p>0</text:p>
          </table:table-cell>
          <table:table-cell office:value-type="string" calcext:value-type="string">
            <text:p>ウォッチャー¶「即応」を持つイジンが相手の戦場にいる間「ブロック+4000」を得る。</text:p>
          </table:table-cell>
          <table:table-cell table:style-name="ce8" table:formula="of:=NA()" office:value-type="string" office:string-value="" calcext:value-type="error">
            <text:p>#N/A</text:p>
          </table:table-cell>
          <table:table-cell table:formula="of:=IFERROR(VLOOKUP([.$V156];[$遺業能力番号.$A$1:$遺業能力番号.$B$9];2;0);0)" office:value-type="float" office:value="0" calcext:value-type="float">
            <text:p>0</text:p>
          </table:table-cell>
          <table:table-cell office:value-type="string" calcext:value-type="string">
            <text:p>https://one-draw.jp/ijinden/cardlist/002/card/02_023.png</text:p>
          </table:table-cell>
          <table:table-cell table:formula="of:=CONCATENATE([$JSON.$A$1];[.$C156];[$JSON.$B$1];[.$E156];[$JSON.$C$1];[.$F156];[$JSON.$D$1];IF(ISNA([.$S156]);&quot;null&quot;;&quot;&quot;&quot;&quot;&amp;[.$S156]&amp;&quot;&quot;&quot;&quot;);[$JSON.$E$1];[.$U156];[$JSON.$F$1];IF(ISNA([.$V156]);&quot;null&quot;;&quot;&quot;&quot;&quot;&amp;[.$V156]&amp;&quot;&quot;&quot;&quot;);[$JSON.$G$1];[.$X156];[$JSON.$H$1];[.$H156];[$JSON.$I$1];[.J156];[$JSON.$J$1];[.$L156];[$JSON.$K$1];[.$O156];[$JSON.$L$1];[.$N156];[$JSON.$M$1];[.$R156];[$JSON.$N$1];[.$T156];[$JSON.$O$1];[.$W156];[$JSON.$P$1];[.$A156];[$JSON.$Q$1];[.$B156];[$JSON.$R$1])" office:value-type="string" office:string-value="{&quot;id&quot;:&quot;2-23&quot;,&quot;name&quot;:&quot;李舜臣&quot;,&quot;kana&quot;:&quot;りしゅんしん&quot;,&quot;traitText&quot;:null,&quot;ruleText&quot;:&quot;ウォッチャー¶「即応」を持つイジンが相手の戦場にいる間「ブロック+4000」を得る。&quot;,&quot;legacyText&quot;:null,&quot;imageUrl&quot;:&quot;https://one-draw.jp/ijinden/cardlist/002/card/02_023.png&quot;,&quot;expansion&quot;:25,&quot;rarity&quot;:1,&quot;type&quot;:1,&quot;level&quot;:7,&quot;color&quot;:2,&quot;term&quot;:0,&quot;trait&quot;:0,&quot;legacy&quot;:0,&quot;orderTable&quot;:155,&quot;orderDeck&quot;:205}," calcext:value-type="string">
            <text:p>{"id":"2-23","name":"李舜臣","kana":"りしゅんしん","traitText":null,"ruleText":"ウォッチャー¶「即応」を持つイジンが相手の戦場にいる間「ブロック+4000」を得る。","legacyText":null,"imageUrl":"https://one-draw.jp/ijinden/cardlist/002/card/02_023.png","expansion":25,"rarity":1,"type":1,"level":7,"color":2,"term":0,"trait":0,"legacy":0,"orderTable":155,"orderDeck":205},</text:p>
          </table:table-cell>
          <table:table-cell table:number-columns-repeated="16347"/>
        </table:table-row>
        <table:table-row table:style-name="ro2">
          <table:table-cell office:value-type="float" office:value="156" calcext:value-type="float">
            <text:p>156</text:p>
          </table:table-cell>
          <table:table-cell office:value-type="float" office:value="159" calcext:value-type="float">
            <text:p>159</text:p>
          </table:table-cell>
          <table:table-cell office:value-type="string" calcext:value-type="string">
            <text:p>2-24</text:p>
          </table:table-cell>
          <table:table-cell office:value-type="float" office:value="24" calcext:value-type="float">
            <text:p>24</text:p>
          </table:table-cell>
          <table:table-cell office:value-type="string" calcext:value-type="string">
            <text:p>山田長政</text:p>
          </table:table-cell>
          <table:table-cell office:value-type="string" calcext:value-type="string">
            <text:p>やまだながまさ</text:p>
          </table:table-cell>
          <table:table-cell office:value-type="string" calcext:value-type="string">
            <text:p>第２弾ブースターパック</text:p>
          </table:table-cell>
          <table:table-cell table:formula="of:=VLOOKUP([.G157];[$収録番号.$A$1:$収録番号.$B$9];2;0)" office:value-type="float" office:value="25" calcext:value-type="float">
            <text:p>25</text:p>
          </table:table-cell>
          <table:table-cell office:value-type="string" calcext:value-type="string">
            <text:p>N</text:p>
          </table:table-cell>
          <table:table-cell table:formula="of:=VLOOKUP([.I157];[$レアリティ番号.$A$1:$レアリティ番号.$B$4];2;0)" office:value-type="float" office:value="1" calcext:value-type="float">
            <text:p>1</text:p>
          </table:table-cell>
          <table:table-cell office:value-type="string" calcext:value-type="string">
            <text:p>イジン</text:p>
          </table:table-cell>
          <table:table-cell table:formula="of:=VLOOKUP([.K157];[$種類番号.$A$1:$種類番号.$B$4];2;0)" office:value-type="float" office:value="1" calcext:value-type="float">
            <text:p>1</text:p>
          </table:table-cell>
          <table:table-cell office:value-type="string" calcext:value-type="string">
            <text:p>青</text:p>
          </table:table-cell>
          <table:table-cell table:formula="of:=VLOOKUP([.M157];[$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航海</text:p>
          </table:table-cell>
          <table:table-cell table:formula="of:=IFERROR(VLOOKUP([.$Q157];[$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157];[$特性番号.$A$1:$特性番号.$B$8];2;0);0)" office:value-type="float" office:value="0" calcext:value-type="float">
            <text:p>0</text:p>
          </table:table-cell>
          <table:table-cell office:value-type="string" calcext:value-type="string">
            <text:p>航海 - アタッカーになったとき、相手の戦場のイジン1体を指定して発動できる。次のブロックステップに際し、そのイジンは、これをブロックする。</text:p>
          </table:table-cell>
          <table:table-cell table:style-name="ce8" office:value-type="string" calcext:value-type="string">
            <text:p>1ドローする</text:p>
          </table:table-cell>
          <table:table-cell table:formula="of:=IFERROR(VLOOKUP([.$V157];[$遺業能力番号.$A$1:$遺業能力番号.$B$9];2;0);0)" office:value-type="float" office:value="4" calcext:value-type="float">
            <text:p>4</text:p>
          </table:table-cell>
          <table:table-cell office:value-type="string" calcext:value-type="string">
            <text:p>https://one-draw.jp/ijinden/cardlist/002/card/02_024.png</text:p>
          </table:table-cell>
          <table:table-cell table:formula="of:=CONCATENATE([$JSON.$A$1];[.$C157];[$JSON.$B$1];[.$E157];[$JSON.$C$1];[.$F157];[$JSON.$D$1];IF(ISNA([.$S157]);&quot;null&quot;;&quot;&quot;&quot;&quot;&amp;[.$S157]&amp;&quot;&quot;&quot;&quot;);[$JSON.$E$1];[.$U157];[$JSON.$F$1];IF(ISNA([.$V157]);&quot;null&quot;;&quot;&quot;&quot;&quot;&amp;[.$V157]&amp;&quot;&quot;&quot;&quot;);[$JSON.$G$1];[.$X157];[$JSON.$H$1];[.$H157];[$JSON.$I$1];[.J157];[$JSON.$J$1];[.$L157];[$JSON.$K$1];[.$O157];[$JSON.$L$1];[.$N157];[$JSON.$M$1];[.$R157];[$JSON.$N$1];[.$T157];[$JSON.$O$1];[.$W157];[$JSON.$P$1];[.$A157];[$JSON.$Q$1];[.$B157];[$JSON.$R$1])" office:value-type="string" office:string-value="{&quot;id&quot;:&quot;2-24&quot;,&quot;name&quot;:&quot;山田長政&quot;,&quot;kana&quot;:&quot;やまだながまさ&quot;,&quot;traitText&quot;:null,&quot;ruleText&quot;:&quot;航海 - アタッカーになったとき、相手の戦場のイジン1体を指定して発動できる。次のブロックステップに際し、そのイジンは、これをブロックする。&quot;,&quot;legacyText&quot;:&quot;1ドローする&quot;,&quot;imageUrl&quot;:&quot;https://one-draw.jp/ijinden/cardlist/002/card/02_024.png&quot;,&quot;expansion&quot;:25,&quot;rarity&quot;:1,&quot;type&quot;:1,&quot;level&quot;:5,&quot;color&quot;:2,&quot;term&quot;:1,&quot;trait&quot;:0,&quot;legacy&quot;:4,&quot;orderTable&quot;:156,&quot;orderDeck&quot;:159}," calcext:value-type="string">
            <text:p>{"id":"2-24","name":"山田長政","kana":"やまだながまさ","traitText":null,"ruleText":"航海 - アタッカーになったとき、相手の戦場のイジン1体を指定して発動できる。次のブロックステップに際し、そのイジンは、これをブロックする。","legacyText":"1ドローする","imageUrl":"https://one-draw.jp/ijinden/cardlist/002/card/02_024.png","expansion":25,"rarity":1,"type":1,"level":5,"color":2,"term":1,"trait":0,"legacy":4,"orderTable":156,"orderDeck":159},</text:p>
          </table:table-cell>
          <table:table-cell table:number-columns-repeated="16347"/>
        </table:table-row>
        <table:table-row table:style-name="ro2">
          <table:table-cell office:value-type="float" office:value="157" calcext:value-type="float">
            <text:p>157</text:p>
          </table:table-cell>
          <table:table-cell office:value-type="float" office:value="194" calcext:value-type="float">
            <text:p>194</text:p>
          </table:table-cell>
          <table:table-cell office:value-type="string" calcext:value-type="string">
            <text:p>2-25</text:p>
          </table:table-cell>
          <table:table-cell office:value-type="float" office:value="25" calcext:value-type="float">
            <text:p>25</text:p>
          </table:table-cell>
          <table:table-cell office:value-type="string" calcext:value-type="string">
            <text:p>運慶</text:p>
          </table:table-cell>
          <table:table-cell office:value-type="string" calcext:value-type="string">
            <text:p>うんけい</text:p>
          </table:table-cell>
          <table:table-cell office:value-type="string" calcext:value-type="string">
            <text:p>第２弾ブースターパック</text:p>
          </table:table-cell>
          <table:table-cell table:formula="of:=VLOOKUP([.G158];[$収録番号.$A$1:$収録番号.$B$9];2;0)" office:value-type="float" office:value="25" calcext:value-type="float">
            <text:p>25</text:p>
          </table:table-cell>
          <table:table-cell office:value-type="string" calcext:value-type="string">
            <text:p>N</text:p>
          </table:table-cell>
          <table:table-cell table:formula="of:=VLOOKUP([.I158];[$レアリティ番号.$A$1:$レアリティ番号.$B$4];2;0)" office:value-type="float" office:value="1" calcext:value-type="float">
            <text:p>1</text:p>
          </table:table-cell>
          <table:table-cell office:value-type="string" calcext:value-type="string">
            <text:p>イジン</text:p>
          </table:table-cell>
          <table:table-cell table:formula="of:=VLOOKUP([.K158];[$種類番号.$A$1:$種類番号.$B$4];2;0)" office:value-type="float" office:value="1" calcext:value-type="float">
            <text:p>1</text:p>
          </table:table-cell>
          <table:table-cell office:value-type="string" calcext:value-type="string">
            <text:p>緑</text:p>
          </table:table-cell>
          <table:table-cell table:formula="of:=VLOOKUP([.M158];[$色番号.$A$1:$色番号.$B$10];2;0)" office:value-type="float" office:value="4" calcext:value-type="float">
            <text:p>4</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5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58];[$特性番号.$A$1:$特性番号.$B$8];2;0);0)" office:value-type="float" office:value="0" calcext:value-type="float">
            <text:p>0</text:p>
          </table:table-cell>
          <table:table-cell office:value-type="string" calcext:value-type="string">
            <text:p>戦場に置かれたとき、自分の戦場のハイケイ1つにつき1ドローする。¶自分の戦場のハイケイ1つにつき「パワー+500」を得る。</text:p>
          </table:table-cell>
          <table:table-cell table:style-name="ce8" table:formula="of:=NA()" office:value-type="string" office:string-value="" calcext:value-type="error">
            <text:p>#N/A</text:p>
          </table:table-cell>
          <table:table-cell table:formula="of:=IFERROR(VLOOKUP([.$V158];[$遺業能力番号.$A$1:$遺業能力番号.$B$9];2;0);0)" office:value-type="float" office:value="0" calcext:value-type="float">
            <text:p>0</text:p>
          </table:table-cell>
          <table:table-cell office:value-type="string" calcext:value-type="string">
            <text:p>https://one-draw.jp/ijinden/cardlist/002/card/02_025.png</text:p>
          </table:table-cell>
          <table:table-cell table:formula="of:=CONCATENATE([$JSON.$A$1];[.$C158];[$JSON.$B$1];[.$E158];[$JSON.$C$1];[.$F158];[$JSON.$D$1];IF(ISNA([.$S158]);&quot;null&quot;;&quot;&quot;&quot;&quot;&amp;[.$S158]&amp;&quot;&quot;&quot;&quot;);[$JSON.$E$1];[.$U158];[$JSON.$F$1];IF(ISNA([.$V158]);&quot;null&quot;;&quot;&quot;&quot;&quot;&amp;[.$V158]&amp;&quot;&quot;&quot;&quot;);[$JSON.$G$1];[.$X158];[$JSON.$H$1];[.$H158];[$JSON.$I$1];[.J158];[$JSON.$J$1];[.$L158];[$JSON.$K$1];[.$O158];[$JSON.$L$1];[.$N158];[$JSON.$M$1];[.$R158];[$JSON.$N$1];[.$T158];[$JSON.$O$1];[.$W158];[$JSON.$P$1];[.$A158];[$JSON.$Q$1];[.$B158];[$JSON.$R$1])" office:value-type="string" office:string-value="{&quot;id&quot;:&quot;2-25&quot;,&quot;name&quot;:&quot;運慶&quot;,&quot;kana&quot;:&quot;うんけい&quot;,&quot;traitText&quot;:null,&quot;ruleText&quot;:&quot;戦場に置かれたとき、自分の戦場のハイケイ1つにつき1ドローする。¶自分の戦場のハイケイ1つにつき「パワー+500」を得る。&quot;,&quot;legacyText&quot;:null,&quot;imageUrl&quot;:&quot;https://one-draw.jp/ijinden/cardlist/002/card/02_025.png&quot;,&quot;expansion&quot;:25,&quot;rarity&quot;:1,&quot;type&quot;:1,&quot;level&quot;:6,&quot;color&quot;:4,&quot;term&quot;:0,&quot;trait&quot;:0,&quot;legacy&quot;:0,&quot;orderTable&quot;:157,&quot;orderDeck&quot;:194}," calcext:value-type="string">
            <text:p>{"id":"2-25","name":"運慶","kana":"うんけい","traitText":null,"ruleText":"戦場に置かれたとき、自分の戦場のハイケイ1つにつき1ドローする。¶自分の戦場のハイケイ1つにつき「パワー+500」を得る。","legacyText":null,"imageUrl":"https://one-draw.jp/ijinden/cardlist/002/card/02_025.png","expansion":25,"rarity":1,"type":1,"level":6,"color":4,"term":0,"trait":0,"legacy":0,"orderTable":157,"orderDeck":194},</text:p>
          </table:table-cell>
          <table:table-cell table:number-columns-repeated="16347"/>
        </table:table-row>
        <table:table-row table:style-name="ro2">
          <table:table-cell office:value-type="float" office:value="158" calcext:value-type="float">
            <text:p>158</text:p>
          </table:table-cell>
          <table:table-cell office:value-type="float" office:value="47" calcext:value-type="float">
            <text:p>47</text:p>
          </table:table-cell>
          <table:table-cell office:value-type="string" calcext:value-type="string">
            <text:p>2-26</text:p>
          </table:table-cell>
          <table:table-cell office:value-type="float" office:value="26" calcext:value-type="float">
            <text:p>26</text:p>
          </table:table-cell>
          <table:table-cell office:value-type="string" calcext:value-type="string">
            <text:p>ハリエット・ビーチャー・ストウ</text:p>
          </table:table-cell>
          <table:table-cell office:value-type="string" calcext:value-type="string">
            <text:p>はりえっとびーちゃーすとう</text:p>
          </table:table-cell>
          <table:table-cell office:value-type="string" calcext:value-type="string">
            <text:p>第２弾ブースターパック</text:p>
          </table:table-cell>
          <table:table-cell table:formula="of:=VLOOKUP([.G159];[$収録番号.$A$1:$収録番号.$B$9];2;0)" office:value-type="float" office:value="25" calcext:value-type="float">
            <text:p>25</text:p>
          </table:table-cell>
          <table:table-cell office:value-type="string" calcext:value-type="string">
            <text:p>R</text:p>
          </table:table-cell>
          <table:table-cell table:formula="of:=VLOOKUP([.I159];[$レアリティ番号.$A$1:$レアリティ番号.$B$4];2;0)" office:value-type="float" office:value="2" calcext:value-type="float">
            <text:p>2</text:p>
          </table:table-cell>
          <table:table-cell office:value-type="string" calcext:value-type="string">
            <text:p>イジン</text:p>
          </table:table-cell>
          <table:table-cell table:formula="of:=VLOOKUP([.K159];[$種類番号.$A$1:$種類番号.$B$4];2;0)" office:value-type="float" office:value="1" calcext:value-type="float">
            <text:p>1</text:p>
          </table:table-cell>
          <table:table-cell office:value-type="string" calcext:value-type="string">
            <text:p>緑</text:p>
          </table:table-cell>
          <table:table-cell table:formula="of:=VLOOKUP([.M159];[$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執筆</text:p>
          </table:table-cell>
          <table:table-cell table:formula="of:=IFERROR(VLOOKUP([.$Q159];[$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159];[$特性番号.$A$1:$特性番号.$B$8];2;0);0)" office:value-type="float" office:value="0" calcext:value-type="float">
            <text:p>0</text:p>
          </table:table-cell>
          <table:table-cell office:value-type="string" calcext:value-type="string">
            <text:p>執筆 - この能力は、このターンにバトルしているなら発動しない。ハイケイが戦場に置かれたときに発動できる。ターンプレイヤーは1ドローして、このターンの間、バトルできない。</text:p>
          </table:table-cell>
          <table:table-cell table:style-name="ce8" office:value-type="string" calcext:value-type="string">
            <text:p>1ドローする</text:p>
          </table:table-cell>
          <table:table-cell table:formula="of:=IFERROR(VLOOKUP([.$V159];[$遺業能力番号.$A$1:$遺業能力番号.$B$9];2;0);0)" office:value-type="float" office:value="4" calcext:value-type="float">
            <text:p>4</text:p>
          </table:table-cell>
          <table:table-cell office:value-type="string" calcext:value-type="string">
            <text:p>https://one-draw.jp/ijinden/cardlist/002/card/02_026.png</text:p>
          </table:table-cell>
          <table:table-cell table:formula="of:=CONCATENATE([$JSON.$A$1];[.$C159];[$JSON.$B$1];[.$E159];[$JSON.$C$1];[.$F159];[$JSON.$D$1];IF(ISNA([.$S159]);&quot;null&quot;;&quot;&quot;&quot;&quot;&amp;[.$S159]&amp;&quot;&quot;&quot;&quot;);[$JSON.$E$1];[.$U159];[$JSON.$F$1];IF(ISNA([.$V159]);&quot;null&quot;;&quot;&quot;&quot;&quot;&amp;[.$V159]&amp;&quot;&quot;&quot;&quot;);[$JSON.$G$1];[.$X159];[$JSON.$H$1];[.$H159];[$JSON.$I$1];[.J159];[$JSON.$J$1];[.$L159];[$JSON.$K$1];[.$O159];[$JSON.$L$1];[.$N159];[$JSON.$M$1];[.$R159];[$JSON.$N$1];[.$T159];[$JSON.$O$1];[.$W159];[$JSON.$P$1];[.$A159];[$JSON.$Q$1];[.$B159];[$JSON.$R$1])" office:value-type="string" office:string-value="{&quot;id&quot;:&quot;2-26&quot;,&quot;name&quot;:&quot;ハリエット・ビーチャー・ストウ&quot;,&quot;kana&quot;:&quot;はりえっとびーちゃーすとう&quot;,&quot;traitText&quot;:null,&quot;ruleText&quot;:&quot;執筆 - この能力は、このターンにバトルしているなら発動しない。ハイケイが戦場に置かれたときに発動できる。ターンプレイヤーは1ドローして、このターンの間、バトルできない。&quot;,&quot;legacyText&quot;:&quot;1ドローする&quot;,&quot;imageUrl&quot;:&quot;https://one-draw.jp/ijinden/cardlist/002/card/02_026.png&quot;,&quot;expansion&quot;:25,&quot;rarity&quot;:2,&quot;type&quot;:1,&quot;level&quot;:2,&quot;color&quot;:4,&quot;term&quot;:2,&quot;trait&quot;:0,&quot;legacy&quot;:4,&quot;orderTable&quot;:158,&quot;orderDeck&quot;:47}," calcext:value-type="string">
            <text:p>{"id":"2-26","name":"ハリエット・ビーチャー・ストウ","kana":"はりえっとびーちゃーすとう","traitText":null,"ruleText":"執筆 - この能力は、このターンにバトルしているなら発動しない。ハイケイが戦場に置かれたときに発動できる。ターンプレイヤーは1ドローして、このターンの間、バトルできない。","legacyText":"1ドローする","imageUrl":"https://one-draw.jp/ijinden/cardlist/002/card/02_026.png","expansion":25,"rarity":2,"type":1,"level":2,"color":4,"term":2,"trait":0,"legacy":4,"orderTable":158,"orderDeck":47},</text:p>
          </table:table-cell>
          <table:table-cell table:number-columns-repeated="16347"/>
        </table:table-row>
        <table:table-row table:style-name="ro2">
          <table:table-cell office:value-type="float" office:value="159" calcext:value-type="float">
            <text:p>159</text:p>
          </table:table-cell>
          <table:table-cell office:value-type="float" office:value="89" calcext:value-type="float">
            <text:p>89</text:p>
          </table:table-cell>
          <table:table-cell office:value-type="string" calcext:value-type="string">
            <text:p>2-27</text:p>
          </table:table-cell>
          <table:table-cell office:value-type="float" office:value="27" calcext:value-type="float">
            <text:p>27</text:p>
          </table:table-cell>
          <table:table-cell office:value-type="string" calcext:value-type="string">
            <text:p>コシャマイン</text:p>
          </table:table-cell>
          <table:table-cell office:value-type="string" calcext:value-type="string">
            <text:p>こしゃまいん</text:p>
          </table:table-cell>
          <table:table-cell office:value-type="string" calcext:value-type="string">
            <text:p>第２弾ブースターパック</text:p>
          </table:table-cell>
          <table:table-cell table:formula="of:=VLOOKUP([.G160];[$収録番号.$A$1:$収録番号.$B$9];2;0)" office:value-type="float" office:value="25" calcext:value-type="float">
            <text:p>25</text:p>
          </table:table-cell>
          <table:table-cell office:value-type="string" calcext:value-type="string">
            <text:p>R</text:p>
          </table:table-cell>
          <table:table-cell table:formula="of:=VLOOKUP([.I160];[$レアリティ番号.$A$1:$レアリティ番号.$B$4];2;0)" office:value-type="float" office:value="2" calcext:value-type="float">
            <text:p>2</text:p>
          </table:table-cell>
          <table:table-cell office:value-type="string" calcext:value-type="string">
            <text:p>イジン</text:p>
          </table:table-cell>
          <table:table-cell table:formula="of:=VLOOKUP([.K160];[$種類番号.$A$1:$種類番号.$B$4];2;0)" office:value-type="float" office:value="1" calcext:value-type="float">
            <text:p>1</text:p>
          </table:table-cell>
          <table:table-cell office:value-type="string" calcext:value-type="string">
            <text:p>緑</text:p>
          </table:table-cell>
          <table:table-cell table:formula="of:=VLOOKUP([.M160];[$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決起</text:p>
          </table:table-cell>
          <table:table-cell table:formula="of:=IFERROR(VLOOKUP([.$Q160];[$能力語番号.$A$1:$能力語番号.$B$10];2;0);0)" office:value-type="float" office:value="4" calcext:value-type="float">
            <text:p>4</text:p>
          </table:table-cell>
          <table:table-cell table:formula="of:=NA()" office:value-type="string" office:string-value="" calcext:value-type="error">
            <text:p>#N/A</text:p>
          </table:table-cell>
          <table:table-cell table:formula="of:=IFERROR(VLOOKUP([.$S160];[$特性番号.$A$1:$特性番号.$B$8];2;0);0)" office:value-type="float" office:value="0" calcext:value-type="float">
            <text:p>0</text:p>
          </table:table-cell>
          <table:table-cell office:value-type="string" calcext:value-type="string">
            <text:p>決起 - マリョク配置によってカードが自分の魔力ゾーンに置かれたとき、自分の魔力ゾーンのマリョクが4つ以上なら発動できる。このターンの間、自分の魔力ゾーンの『ストーン』マリョクは「レベル+1」される。</text:p>
          </table:table-cell>
          <table:table-cell table:style-name="ce8" office:value-type="string" calcext:value-type="string">
            <text:p>反魂</text:p>
          </table:table-cell>
          <table:table-cell table:formula="of:=IFERROR(VLOOKUP([.$V160];[$遺業能力番号.$A$1:$遺業能力番号.$B$9];2;0);0)" office:value-type="float" office:value="6" calcext:value-type="float">
            <text:p>6</text:p>
          </table:table-cell>
          <table:table-cell office:value-type="string" calcext:value-type="string">
            <text:p>https://one-draw.jp/ijinden/cardlist/002/card/02_027.png</text:p>
          </table:table-cell>
          <table:table-cell table:formula="of:=CONCATENATE([$JSON.$A$1];[.$C160];[$JSON.$B$1];[.$E160];[$JSON.$C$1];[.$F160];[$JSON.$D$1];IF(ISNA([.$S160]);&quot;null&quot;;&quot;&quot;&quot;&quot;&amp;[.$S160]&amp;&quot;&quot;&quot;&quot;);[$JSON.$E$1];[.$U160];[$JSON.$F$1];IF(ISNA([.$V160]);&quot;null&quot;;&quot;&quot;&quot;&quot;&amp;[.$V160]&amp;&quot;&quot;&quot;&quot;);[$JSON.$G$1];[.$X160];[$JSON.$H$1];[.$H160];[$JSON.$I$1];[.J160];[$JSON.$J$1];[.$L160];[$JSON.$K$1];[.$O160];[$JSON.$L$1];[.$N160];[$JSON.$M$1];[.$R160];[$JSON.$N$1];[.$T160];[$JSON.$O$1];[.$W160];[$JSON.$P$1];[.$A160];[$JSON.$Q$1];[.$B160];[$JSON.$R$1])" office:value-type="string" office:string-value="{&quot;id&quot;:&quot;2-27&quot;,&quot;name&quot;:&quot;コシャマイン&quot;,&quot;kana&quot;:&quot;こしゃまいん&quot;,&quot;traitText&quot;:null,&quot;ruleText&quot;:&quot;決起 - マリョク配置によってカードが自分の魔力ゾーンに置かれたとき、自分の魔力ゾーンのマリョクが4つ以上なら発動できる。このターンの間、自分の魔力ゾーンの『ストーン』マリョクは「レベル+1」される。&quot;,&quot;legacyText&quot;:&quot;反魂&quot;,&quot;imageUrl&quot;:&quot;https://one-draw.jp/ijinden/cardlist/002/card/02_027.png&quot;,&quot;expansion&quot;:25,&quot;rarity&quot;:2,&quot;type&quot;:1,&quot;level&quot;:3,&quot;color&quot;:4,&quot;term&quot;:4,&quot;trait&quot;:0,&quot;legacy&quot;:6,&quot;orderTable&quot;:159,&quot;orderDeck&quot;:89}," calcext:value-type="string">
            <text:p>{"id":"2-27","name":"コシャマイン","kana":"こしゃまいん","traitText":null,"ruleText":"決起 - マリョク配置によってカードが自分の魔力ゾーンに置かれたとき、自分の魔力ゾーンのマリョクが4つ以上なら発動できる。このターンの間、自分の魔力ゾーンの『ストーン』マリョクは「レベル+1」される。","legacyText":"反魂","imageUrl":"https://one-draw.jp/ijinden/cardlist/002/card/02_027.png","expansion":25,"rarity":2,"type":1,"level":3,"color":4,"term":4,"trait":0,"legacy":6,"orderTable":159,"orderDeck":89},</text:p>
          </table:table-cell>
          <table:table-cell table:number-columns-repeated="16347"/>
        </table:table-row>
        <table:table-row table:style-name="ro2">
          <table:table-cell office:value-type="float" office:value="160" calcext:value-type="float">
            <text:p>160</text:p>
          </table:table-cell>
          <table:table-cell office:value-type="float" office:value="210" calcext:value-type="float">
            <text:p>210</text:p>
          </table:table-cell>
          <table:table-cell office:value-type="string" calcext:value-type="string">
            <text:p>2-28</text:p>
          </table:table-cell>
          <table:table-cell office:value-type="float" office:value="28" calcext:value-type="float">
            <text:p>28</text:p>
          </table:table-cell>
          <table:table-cell office:value-type="string" calcext:value-type="string">
            <text:p>狩野山楽</text:p>
          </table:table-cell>
          <table:table-cell office:value-type="string" calcext:value-type="string">
            <text:p>かのうさんらく</text:p>
          </table:table-cell>
          <table:table-cell office:value-type="string" calcext:value-type="string">
            <text:p>第２弾ブースターパック</text:p>
          </table:table-cell>
          <table:table-cell table:formula="of:=VLOOKUP([.G161];[$収録番号.$A$1:$収録番号.$B$9];2;0)" office:value-type="float" office:value="25" calcext:value-type="float">
            <text:p>25</text:p>
          </table:table-cell>
          <table:table-cell office:value-type="string" calcext:value-type="string">
            <text:p>N</text:p>
          </table:table-cell>
          <table:table-cell table:formula="of:=VLOOKUP([.I161];[$レアリティ番号.$A$1:$レアリティ番号.$B$4];2;0)" office:value-type="float" office:value="1" calcext:value-type="float">
            <text:p>1</text:p>
          </table:table-cell>
          <table:table-cell office:value-type="string" calcext:value-type="string">
            <text:p>イジン</text:p>
          </table:table-cell>
          <table:table-cell table:formula="of:=VLOOKUP([.K161];[$種類番号.$A$1:$種類番号.$B$4];2;0)" office:value-type="float" office:value="1" calcext:value-type="float">
            <text:p>1</text:p>
          </table:table-cell>
          <table:table-cell office:value-type="string" calcext:value-type="string">
            <text:p>緑</text:p>
          </table:table-cell>
          <table:table-cell table:formula="of:=VLOOKUP([.M161];[$色番号.$A$1:$色番号.$B$10];2;0)" office:value-type="float" office:value="4" calcext:value-type="float">
            <text:p>4</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61];[$能力語番号.$A$1:$能力語番号.$B$10];2;0);0)" office:value-type="float" office:value="0" calcext:value-type="float">
            <text:p>0</text:p>
          </table:table-cell>
          <table:table-cell office:value-type="string" calcext:value-type="string">
            <text:p>美術</text:p>
          </table:table-cell>
          <table:table-cell table:formula="of:=IFERROR(VLOOKUP([.$S161];[$特性番号.$A$1:$特性番号.$B$8];2;0);0)" office:value-type="float" office:value="2" calcext:value-type="float">
            <text:p>2</text:p>
          </table:table-cell>
          <table:table-cell office:value-type="string" calcext:value-type="string">
            <text:p>戦場に置かれたとき、赤のイジンが戦場にいるなら発動する。1ドローして、イジン召喚権+1する。</text:p>
          </table:table-cell>
          <table:table-cell table:style-name="ce8" office:value-type="string" calcext:value-type="string">
            <text:p>1ドローする</text:p>
          </table:table-cell>
          <table:table-cell table:formula="of:=IFERROR(VLOOKUP([.$V161];[$遺業能力番号.$A$1:$遺業能力番号.$B$9];2;0);0)" office:value-type="float" office:value="4" calcext:value-type="float">
            <text:p>4</text:p>
          </table:table-cell>
          <table:table-cell office:value-type="string" calcext:value-type="string">
            <text:p>https://one-draw.jp/ijinden/cardlist/002/card/02_028.png</text:p>
          </table:table-cell>
          <table:table-cell table:formula="of:=CONCATENATE([$JSON.$A$1];[.$C161];[$JSON.$B$1];[.$E161];[$JSON.$C$1];[.$F161];[$JSON.$D$1];IF(ISNA([.$S161]);&quot;null&quot;;&quot;&quot;&quot;&quot;&amp;[.$S161]&amp;&quot;&quot;&quot;&quot;);[$JSON.$E$1];[.$U161];[$JSON.$F$1];IF(ISNA([.$V161]);&quot;null&quot;;&quot;&quot;&quot;&quot;&amp;[.$V161]&amp;&quot;&quot;&quot;&quot;);[$JSON.$G$1];[.$X161];[$JSON.$H$1];[.$H161];[$JSON.$I$1];[.J161];[$JSON.$J$1];[.$L161];[$JSON.$K$1];[.$O161];[$JSON.$L$1];[.$N161];[$JSON.$M$1];[.$R161];[$JSON.$N$1];[.$T161];[$JSON.$O$1];[.$W161];[$JSON.$P$1];[.$A161];[$JSON.$Q$1];[.$B161];[$JSON.$R$1])" office:value-type="string" office:string-value="{&quot;id&quot;:&quot;2-28&quot;,&quot;name&quot;:&quot;狩野山楽&quot;,&quot;kana&quot;:&quot;かのうさんらく&quot;,&quot;traitText&quot;:&quot;美術&quot;,&quot;ruleText&quot;:&quot;戦場に置かれたとき、赤のイジンが戦場にいるなら発動する。1ドローして、イジン召喚権+1する。&quot;,&quot;legacyText&quot;:&quot;1ドローする&quot;,&quot;imageUrl&quot;:&quot;https://one-draw.jp/ijinden/cardlist/002/card/02_028.png&quot;,&quot;expansion&quot;:25,&quot;rarity&quot;:1,&quot;type&quot;:1,&quot;level&quot;:7,&quot;color&quot;:4,&quot;term&quot;:0,&quot;trait&quot;:2,&quot;legacy&quot;:4,&quot;orderTable&quot;:160,&quot;orderDeck&quot;:210}," calcext:value-type="string">
            <text:p>{"id":"2-28","name":"狩野山楽","kana":"かのうさんらく","traitText":"美術","ruleText":"戦場に置かれたとき、赤のイジンが戦場にいるなら発動する。1ドローして、イジン召喚権+1する。","legacyText":"1ドローする","imageUrl":"https://one-draw.jp/ijinden/cardlist/002/card/02_028.png","expansion":25,"rarity":1,"type":1,"level":7,"color":4,"term":0,"trait":2,"legacy":4,"orderTable":160,"orderDeck":210},</text:p>
          </table:table-cell>
          <table:table-cell table:number-columns-repeated="16347"/>
        </table:table-row>
        <table:table-row table:style-name="ro2">
          <table:table-cell office:value-type="float" office:value="161" calcext:value-type="float">
            <text:p>161</text:p>
          </table:table-cell>
          <table:table-cell office:value-type="float" office:value="128" calcext:value-type="float">
            <text:p>128</text:p>
          </table:table-cell>
          <table:table-cell office:value-type="string" calcext:value-type="string">
            <text:p>2-29</text:p>
          </table:table-cell>
          <table:table-cell office:value-type="float" office:value="29" calcext:value-type="float">
            <text:p>29</text:p>
          </table:table-cell>
          <table:table-cell office:value-type="string" calcext:value-type="string">
            <text:p>徳川家光</text:p>
          </table:table-cell>
          <table:table-cell office:value-type="string" calcext:value-type="string">
            <text:p>とくがわいえみつ</text:p>
          </table:table-cell>
          <table:table-cell office:value-type="string" calcext:value-type="string">
            <text:p>第２弾ブースターパック</text:p>
          </table:table-cell>
          <table:table-cell table:formula="of:=VLOOKUP([.G162];[$収録番号.$A$1:$収録番号.$B$9];2;0)" office:value-type="float" office:value="25" calcext:value-type="float">
            <text:p>25</text:p>
          </table:table-cell>
          <table:table-cell office:value-type="string" calcext:value-type="string">
            <text:p>N</text:p>
          </table:table-cell>
          <table:table-cell table:formula="of:=VLOOKUP([.I162];[$レアリティ番号.$A$1:$レアリティ番号.$B$4];2;0)" office:value-type="float" office:value="1" calcext:value-type="float">
            <text:p>1</text:p>
          </table:table-cell>
          <table:table-cell office:value-type="string" calcext:value-type="string">
            <text:p>イジン</text:p>
          </table:table-cell>
          <table:table-cell table:formula="of:=VLOOKUP([.K162];[$種類番号.$A$1:$種類番号.$B$4];2;0)" office:value-type="float" office:value="1" calcext:value-type="float">
            <text:p>1</text:p>
          </table:table-cell>
          <table:table-cell office:value-type="string" calcext:value-type="string">
            <text:p>緑</text:p>
          </table:table-cell>
          <table:table-cell table:formula="of:=VLOOKUP([.M162];[$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6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62];[$特性番号.$A$1:$特性番号.$B$8];2;0);0)" office:value-type="float" office:value="0" calcext:value-type="float">
            <text:p>0</text:p>
          </table:table-cell>
          <table:table-cell office:value-type="string" calcext:value-type="string">
            <text:p>戦場に置かれたとき、自分の魔力ゾーンのマリョク1つを裏にして発動できる。自分の戦場にある色1つにつきイジン召喚権+1する。</text:p>
          </table:table-cell>
          <table:table-cell table:style-name="ce8" office:value-type="string" calcext:value-type="string">
            <text:p>1ドローする</text:p>
          </table:table-cell>
          <table:table-cell table:formula="of:=IFERROR(VLOOKUP([.$V162];[$遺業能力番号.$A$1:$遺業能力番号.$B$9];2;0);0)" office:value-type="float" office:value="4" calcext:value-type="float">
            <text:p>4</text:p>
          </table:table-cell>
          <table:table-cell office:value-type="string" calcext:value-type="string">
            <text:p>https://one-draw.jp/ijinden/cardlist/002/card/02_029.png</text:p>
          </table:table-cell>
          <table:table-cell table:formula="of:=CONCATENATE([$JSON.$A$1];[.$C162];[$JSON.$B$1];[.$E162];[$JSON.$C$1];[.$F162];[$JSON.$D$1];IF(ISNA([.$S162]);&quot;null&quot;;&quot;&quot;&quot;&quot;&amp;[.$S162]&amp;&quot;&quot;&quot;&quot;);[$JSON.$E$1];[.$U162];[$JSON.$F$1];IF(ISNA([.$V162]);&quot;null&quot;;&quot;&quot;&quot;&quot;&amp;[.$V162]&amp;&quot;&quot;&quot;&quot;);[$JSON.$G$1];[.$X162];[$JSON.$H$1];[.$H162];[$JSON.$I$1];[.J162];[$JSON.$J$1];[.$L162];[$JSON.$K$1];[.$O162];[$JSON.$L$1];[.$N162];[$JSON.$M$1];[.$R162];[$JSON.$N$1];[.$T162];[$JSON.$O$1];[.$W162];[$JSON.$P$1];[.$A162];[$JSON.$Q$1];[.$B162];[$JSON.$R$1])" office:value-type="string" office:string-value="{&quot;id&quot;:&quot;2-29&quot;,&quot;name&quot;:&quot;徳川家光&quot;,&quot;kana&quot;:&quot;とくがわいえみつ&quot;,&quot;traitText&quot;:null,&quot;ruleText&quot;:&quot;戦場に置かれたとき、自分の魔力ゾーンのマリョク1つを裏にして発動できる。自分の戦場にある色1つにつきイジン召喚権+1する。&quot;,&quot;legacyText&quot;:&quot;1ドローする&quot;,&quot;imageUrl&quot;:&quot;https://one-draw.jp/ijinden/cardlist/002/card/02_029.png&quot;,&quot;expansion&quot;:25,&quot;rarity&quot;:1,&quot;type&quot;:1,&quot;level&quot;:4,&quot;color&quot;:4,&quot;term&quot;:0,&quot;trait&quot;:0,&quot;legacy&quot;:4,&quot;orderTable&quot;:161,&quot;orderDeck&quot;:128}," calcext:value-type="string">
            <text:p>{"id":"2-29","name":"徳川家光","kana":"とくがわいえみつ","traitText":null,"ruleText":"戦場に置かれたとき、自分の魔力ゾーンのマリョク1つを裏にして発動できる。自分の戦場にある色1つにつきイジン召喚権+1する。","legacyText":"1ドローする","imageUrl":"https://one-draw.jp/ijinden/cardlist/002/card/02_029.png","expansion":25,"rarity":1,"type":1,"level":4,"color":4,"term":0,"trait":0,"legacy":4,"orderTable":161,"orderDeck":128},</text:p>
          </table:table-cell>
          <table:table-cell table:number-columns-repeated="16347"/>
        </table:table-row>
        <table:table-row table:style-name="ro2">
          <table:table-cell office:value-type="float" office:value="162" calcext:value-type="float">
            <text:p>162</text:p>
          </table:table-cell>
          <table:table-cell office:value-type="float" office:value="168" calcext:value-type="float">
            <text:p>168</text:p>
          </table:table-cell>
          <table:table-cell office:value-type="string" calcext:value-type="string">
            <text:p>2-30</text:p>
          </table:table-cell>
          <table:table-cell office:value-type="float" office:value="30" calcext:value-type="float">
            <text:p>30</text:p>
          </table:table-cell>
          <table:table-cell office:value-type="string" calcext:value-type="string">
            <text:p>徳川綱吉</text:p>
          </table:table-cell>
          <table:table-cell office:value-type="string" calcext:value-type="string">
            <text:p>とくがわつなよし</text:p>
          </table:table-cell>
          <table:table-cell office:value-type="string" calcext:value-type="string">
            <text:p>第２弾ブースターパック</text:p>
          </table:table-cell>
          <table:table-cell table:formula="of:=VLOOKUP([.G163];[$収録番号.$A$1:$収録番号.$B$9];2;0)" office:value-type="float" office:value="25" calcext:value-type="float">
            <text:p>25</text:p>
          </table:table-cell>
          <table:table-cell office:value-type="string" calcext:value-type="string">
            <text:p>N</text:p>
          </table:table-cell>
          <table:table-cell table:formula="of:=VLOOKUP([.I163];[$レアリティ番号.$A$1:$レアリティ番号.$B$4];2;0)" office:value-type="float" office:value="1" calcext:value-type="float">
            <text:p>1</text:p>
          </table:table-cell>
          <table:table-cell office:value-type="string" calcext:value-type="string">
            <text:p>イジン</text:p>
          </table:table-cell>
          <table:table-cell table:formula="of:=VLOOKUP([.K163];[$種類番号.$A$1:$種類番号.$B$4];2;0)" office:value-type="float" office:value="1" calcext:value-type="float">
            <text:p>1</text:p>
          </table:table-cell>
          <table:table-cell office:value-type="string" calcext:value-type="string">
            <text:p>緑</text:p>
          </table:table-cell>
          <table:table-cell table:formula="of:=VLOOKUP([.M163];[$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6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63];[$特性番号.$A$1:$特性番号.$B$8];2;0);0)" office:value-type="float" office:value="0" calcext:value-type="float">
            <text:p>0</text:p>
          </table:table-cell>
          <table:table-cell office:value-type="string" calcext:value-type="string">
            <text:p>戦場の「剣術」イジン1体につき「パワー+2000」を得る。¶相手のエンドフェイズが開始したとき、このターンにバトルしているなら、相手の戦場のイジン1体を指定して発動できる。そのイジンを裏向きで魔力ゾーンに置く。</text:p>
          </table:table-cell>
          <table:table-cell table:style-name="ce8" office:value-type="string" calcext:value-type="string">
            <text:p>1ドローする</text:p>
          </table:table-cell>
          <table:table-cell table:formula="of:=IFERROR(VLOOKUP([.$V163];[$遺業能力番号.$A$1:$遺業能力番号.$B$9];2;0);0)" office:value-type="float" office:value="4" calcext:value-type="float">
            <text:p>4</text:p>
          </table:table-cell>
          <table:table-cell office:value-type="string" calcext:value-type="string">
            <text:p>https://one-draw.jp/ijinden/cardlist/002/card/02_030.png</text:p>
          </table:table-cell>
          <table:table-cell table:formula="of:=CONCATENATE([$JSON.$A$1];[.$C163];[$JSON.$B$1];[.$E163];[$JSON.$C$1];[.$F163];[$JSON.$D$1];IF(ISNA([.$S163]);&quot;null&quot;;&quot;&quot;&quot;&quot;&amp;[.$S163]&amp;&quot;&quot;&quot;&quot;);[$JSON.$E$1];[.$U163];[$JSON.$F$1];IF(ISNA([.$V163]);&quot;null&quot;;&quot;&quot;&quot;&quot;&amp;[.$V163]&amp;&quot;&quot;&quot;&quot;);[$JSON.$G$1];[.$X163];[$JSON.$H$1];[.$H163];[$JSON.$I$1];[.J163];[$JSON.$J$1];[.$L163];[$JSON.$K$1];[.$O163];[$JSON.$L$1];[.$N163];[$JSON.$M$1];[.$R163];[$JSON.$N$1];[.$T163];[$JSON.$O$1];[.$W163];[$JSON.$P$1];[.$A163];[$JSON.$Q$1];[.$B163];[$JSON.$R$1])" office:value-type="string" office:string-value="{&quot;id&quot;:&quot;2-30&quot;,&quot;name&quot;:&quot;徳川綱吉&quot;,&quot;kana&quot;:&quot;とくがわつなよし&quot;,&quot;traitText&quot;:null,&quot;ruleText&quot;:&quot;戦場の「剣術」イジン1体につき「パワー+2000」を得る。¶相手のエンドフェイズが開始したとき、このターンにバトルしているなら、相手の戦場のイジン1体を指定して発動できる。そのイジンを裏向きで魔力ゾーンに置く。&quot;,&quot;legacyText&quot;:&quot;1ドローする&quot;,&quot;imageUrl&quot;:&quot;https://one-draw.jp/ijinden/cardlist/002/card/02_030.png&quot;,&quot;expansion&quot;:25,&quot;rarity&quot;:1,&quot;type&quot;:1,&quot;level&quot;:5,&quot;color&quot;:4,&quot;term&quot;:0,&quot;trait&quot;:0,&quot;legacy&quot;:4,&quot;orderTable&quot;:162,&quot;orderDeck&quot;:168}," calcext:value-type="string">
            <text:p>{"id":"2-30","name":"徳川綱吉","kana":"とくがわつなよし","traitText":null,"ruleText":"戦場の「剣術」イジン1体につき「パワー+2000」を得る。¶相手のエンドフェイズが開始したとき、このターンにバトルしているなら、相手の戦場のイジン1体を指定して発動できる。そのイジンを裏向きで魔力ゾーンに置く。","legacyText":"1ドローする","imageUrl":"https://one-draw.jp/ijinden/cardlist/002/card/02_030.png","expansion":25,"rarity":1,"type":1,"level":5,"color":4,"term":0,"trait":0,"legacy":4,"orderTable":162,"orderDeck":168},</text:p>
          </table:table-cell>
          <table:table-cell table:number-columns-repeated="16347"/>
        </table:table-row>
        <table:table-row table:style-name="ro2">
          <table:table-cell office:value-type="float" office:value="163" calcext:value-type="float">
            <text:p>163</text:p>
          </table:table-cell>
          <table:table-cell office:value-type="float" office:value="223" calcext:value-type="float">
            <text:p>223</text:p>
          </table:table-cell>
          <table:table-cell office:value-type="string" calcext:value-type="string">
            <text:p>2-31</text:p>
          </table:table-cell>
          <table:table-cell office:value-type="float" office:value="31" calcext:value-type="float">
            <text:p>31</text:p>
          </table:table-cell>
          <table:table-cell office:value-type="string" calcext:value-type="string">
            <text:p>東洲斎写楽</text:p>
          </table:table-cell>
          <table:table-cell office:value-type="string" calcext:value-type="string">
            <text:p>とうしゅうさいしゃらく</text:p>
          </table:table-cell>
          <table:table-cell office:value-type="string" calcext:value-type="string">
            <text:p>第２弾ブースターパック</text:p>
          </table:table-cell>
          <table:table-cell table:formula="of:=VLOOKUP([.G164];[$収録番号.$A$1:$収録番号.$B$9];2;0)" office:value-type="float" office:value="25" calcext:value-type="float">
            <text:p>25</text:p>
          </table:table-cell>
          <table:table-cell office:value-type="string" calcext:value-type="string">
            <text:p>N</text:p>
          </table:table-cell>
          <table:table-cell table:formula="of:=VLOOKUP([.I164];[$レアリティ番号.$A$1:$レアリティ番号.$B$4];2;0)" office:value-type="float" office:value="1" calcext:value-type="float">
            <text:p>1</text:p>
          </table:table-cell>
          <table:table-cell office:value-type="string" calcext:value-type="string">
            <text:p>イジン</text:p>
          </table:table-cell>
          <table:table-cell table:formula="of:=VLOOKUP([.K164];[$種類番号.$A$1:$種類番号.$B$4];2;0)" office:value-type="float" office:value="1" calcext:value-type="float">
            <text:p>1</text:p>
          </table:table-cell>
          <table:table-cell office:value-type="string" calcext:value-type="string">
            <text:p>緑</text:p>
          </table:table-cell>
          <table:table-cell table:formula="of:=VLOOKUP([.M164];[$色番号.$A$1:$色番号.$B$10];2;0)" office:value-type="float" office:value="4" calcext:value-type="float">
            <text:p>4</text:p>
          </table:table-cell>
          <table:table-cell office:value-type="float" office:value="8" calcext:value-type="float">
            <text:p>8</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64];[$能力語番号.$A$1:$能力語番号.$B$10];2;0);0)" office:value-type="float" office:value="0" calcext:value-type="float">
            <text:p>0</text:p>
          </table:table-cell>
          <table:table-cell office:value-type="string" calcext:value-type="string">
            <text:p>美術</text:p>
          </table:table-cell>
          <table:table-cell table:formula="of:=IFERROR(VLOOKUP([.$S164];[$特性番号.$A$1:$特性番号.$B$8];2;0);0)" office:value-type="float" office:value="2" calcext:value-type="float">
            <text:p>2</text:p>
          </table:table-cell>
          <table:table-cell office:value-type="string" calcext:value-type="string">
            <text:p>破壊されたとき、自分の手札か自分の墓地のレベル7以下の「美術」カード1つを指定して発動できる。そのカードを戦場に置く。</text:p>
          </table:table-cell>
          <table:table-cell table:style-name="ce8" office:value-type="string" calcext:value-type="string">
            <text:p>1ドローする</text:p>
          </table:table-cell>
          <table:table-cell table:formula="of:=IFERROR(VLOOKUP([.$V164];[$遺業能力番号.$A$1:$遺業能力番号.$B$9];2;0);0)" office:value-type="float" office:value="4" calcext:value-type="float">
            <text:p>4</text:p>
          </table:table-cell>
          <table:table-cell office:value-type="string" calcext:value-type="string">
            <text:p>https://one-draw.jp/ijinden/cardlist/002/card/02_031.png</text:p>
          </table:table-cell>
          <table:table-cell table:formula="of:=CONCATENATE([$JSON.$A$1];[.$C164];[$JSON.$B$1];[.$E164];[$JSON.$C$1];[.$F164];[$JSON.$D$1];IF(ISNA([.$S164]);&quot;null&quot;;&quot;&quot;&quot;&quot;&amp;[.$S164]&amp;&quot;&quot;&quot;&quot;);[$JSON.$E$1];[.$U164];[$JSON.$F$1];IF(ISNA([.$V164]);&quot;null&quot;;&quot;&quot;&quot;&quot;&amp;[.$V164]&amp;&quot;&quot;&quot;&quot;);[$JSON.$G$1];[.$X164];[$JSON.$H$1];[.$H164];[$JSON.$I$1];[.J164];[$JSON.$J$1];[.$L164];[$JSON.$K$1];[.$O164];[$JSON.$L$1];[.$N164];[$JSON.$M$1];[.$R164];[$JSON.$N$1];[.$T164];[$JSON.$O$1];[.$W164];[$JSON.$P$1];[.$A164];[$JSON.$Q$1];[.$B164];[$JSON.$R$1])" office:value-type="string" office:string-value="{&quot;id&quot;:&quot;2-31&quot;,&quot;name&quot;:&quot;東洲斎写楽&quot;,&quot;kana&quot;:&quot;とうしゅうさいしゃらく&quot;,&quot;traitText&quot;:&quot;美術&quot;,&quot;ruleText&quot;:&quot;破壊されたとき、自分の手札か自分の墓地のレベル7以下の「美術」カード1つを指定して発動できる。そのカードを戦場に置く。&quot;,&quot;legacyText&quot;:&quot;1ドローする&quot;,&quot;imageUrl&quot;:&quot;https://one-draw.jp/ijinden/cardlist/002/card/02_031.png&quot;,&quot;expansion&quot;:25,&quot;rarity&quot;:1,&quot;type&quot;:1,&quot;level&quot;:8,&quot;color&quot;:4,&quot;term&quot;:0,&quot;trait&quot;:2,&quot;legacy&quot;:4,&quot;orderTable&quot;:163,&quot;orderDeck&quot;:223}," calcext:value-type="string">
            <text:p>{"id":"2-31","name":"東洲斎写楽","kana":"とうしゅうさいしゃらく","traitText":"美術","ruleText":"破壊されたとき、自分の手札か自分の墓地のレベル7以下の「美術」カード1つを指定して発動できる。そのカードを戦場に置く。","legacyText":"1ドローする","imageUrl":"https://one-draw.jp/ijinden/cardlist/002/card/02_031.png","expansion":25,"rarity":1,"type":1,"level":8,"color":4,"term":0,"trait":2,"legacy":4,"orderTable":163,"orderDeck":223},</text:p>
          </table:table-cell>
          <table:table-cell table:number-columns-repeated="16347"/>
        </table:table-row>
        <table:table-row table:style-name="ro2">
          <table:table-cell office:value-type="float" office:value="164" calcext:value-type="float">
            <text:p>164</text:p>
          </table:table-cell>
          <table:table-cell office:value-type="float" office:value="134" calcext:value-type="float">
            <text:p>134</text:p>
          </table:table-cell>
          <table:table-cell office:value-type="string" calcext:value-type="string">
            <text:p>2-32</text:p>
          </table:table-cell>
          <table:table-cell office:value-type="float" office:value="32" calcext:value-type="float">
            <text:p>32</text:p>
          </table:table-cell>
          <table:table-cell office:value-type="string" calcext:value-type="string">
            <text:p>曹操</text:p>
          </table:table-cell>
          <table:table-cell office:value-type="string" calcext:value-type="string">
            <text:p>そうそう</text:p>
          </table:table-cell>
          <table:table-cell office:value-type="string" calcext:value-type="string">
            <text:p>第２弾ブースターパック</text:p>
          </table:table-cell>
          <table:table-cell table:formula="of:=VLOOKUP([.G165];[$収録番号.$A$1:$収録番号.$B$9];2;0)" office:value-type="float" office:value="25" calcext:value-type="float">
            <text:p>25</text:p>
          </table:table-cell>
          <table:table-cell office:value-type="string" calcext:value-type="string">
            <text:p>R</text:p>
          </table:table-cell>
          <table:table-cell table:formula="of:=VLOOKUP([.I165];[$レアリティ番号.$A$1:$レアリティ番号.$B$4];2;0)" office:value-type="float" office:value="2" calcext:value-type="float">
            <text:p>2</text:p>
          </table:table-cell>
          <table:table-cell office:value-type="string" calcext:value-type="string">
            <text:p>イジン</text:p>
          </table:table-cell>
          <table:table-cell table:formula="of:=VLOOKUP([.K165];[$種類番号.$A$1:$種類番号.$B$4];2;0)" office:value-type="float" office:value="1" calcext:value-type="float">
            <text:p>1</text:p>
          </table:table-cell>
          <table:table-cell office:value-type="string" calcext:value-type="string">
            <text:p>黄</text:p>
          </table:table-cell>
          <table:table-cell table:formula="of:=VLOOKUP([.M165];[$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office:value-type="string" calcext:value-type="string">
            <text:p>徴募</text:p>
          </table:table-cell>
          <table:table-cell table:formula="of:=IFERROR(VLOOKUP([.$Q165];[$能力語番号.$A$1:$能力語番号.$B$10];2;0);0)" office:value-type="float" office:value="8" calcext:value-type="float">
            <text:p>8</text:p>
          </table:table-cell>
          <table:table-cell table:formula="of:=NA()" office:value-type="string" office:string-value="" calcext:value-type="error">
            <text:p>#N/A</text:p>
          </table:table-cell>
          <table:table-cell table:formula="of:=IFERROR(VLOOKUP([.$S165];[$特性番号.$A$1:$特性番号.$B$8];2;0);0)" office:value-type="float" office:value="0" calcext:value-type="float">
            <text:p>0</text:p>
          </table:table-cell>
          <table:table-cell office:value-type="string" calcext:value-type="string">
            <text:p>自分の戦場の青のイジンがアタッカーになったとき、アタッカー1体を指定して発動できる。指定したアタッカーを破壊して、1ドローする。¶徴募 - この能力は墓地でも発動する。自分のエンドフェイズが開始したとき、このターンにアタッカーが破壊されているなら、自分の手札か自分の墓地のカード1つを指定して発動できる。そのカードをガーディアンにして戦場に置く。</text:p>
          </table:table-cell>
          <table:table-cell table:style-name="ce8" table:formula="of:=NA()" office:value-type="string" office:string-value="" calcext:value-type="error">
            <text:p>#N/A</text:p>
          </table:table-cell>
          <table:table-cell table:formula="of:=IFERROR(VLOOKUP([.$V165];[$遺業能力番号.$A$1:$遺業能力番号.$B$9];2;0);0)" office:value-type="float" office:value="0" calcext:value-type="float">
            <text:p>0</text:p>
          </table:table-cell>
          <table:table-cell office:value-type="string" calcext:value-type="string">
            <text:p>https://one-draw.jp/ijinden/cardlist/002/card/02_032.png</text:p>
          </table:table-cell>
          <table:table-cell table:formula="of:=CONCATENATE([$JSON.$A$1];[.$C165];[$JSON.$B$1];[.$E165];[$JSON.$C$1];[.$F165];[$JSON.$D$1];IF(ISNA([.$S165]);&quot;null&quot;;&quot;&quot;&quot;&quot;&amp;[.$S165]&amp;&quot;&quot;&quot;&quot;);[$JSON.$E$1];[.$U165];[$JSON.$F$1];IF(ISNA([.$V165]);&quot;null&quot;;&quot;&quot;&quot;&quot;&amp;[.$V165]&amp;&quot;&quot;&quot;&quot;);[$JSON.$G$1];[.$X165];[$JSON.$H$1];[.$H165];[$JSON.$I$1];[.J165];[$JSON.$J$1];[.$L165];[$JSON.$K$1];[.$O165];[$JSON.$L$1];[.$N165];[$JSON.$M$1];[.$R165];[$JSON.$N$1];[.$T165];[$JSON.$O$1];[.$W165];[$JSON.$P$1];[.$A165];[$JSON.$Q$1];[.$B165];[$JSON.$R$1])" office:value-type="string" office:string-value="{&quot;id&quot;:&quot;2-32&quot;,&quot;name&quot;:&quot;曹操&quot;,&quot;kana&quot;:&quot;そうそう&quot;,&quot;traitText&quot;:null,&quot;ruleText&quot;:&quot;自分の戦場の青のイジンがアタッカーになったとき、アタッカー1体を指定して発動できる。指定したアタッカーを破壊して、1ドローする。¶徴募 - この能力は墓地でも発動する。自分のエンドフェイズが開始したとき、このターンにアタッカーが破壊されているなら、自分の手札か自分の墓地のカード1つを指定して発動できる。そのカードをガーディアンにして戦場に置く。&quot;,&quot;legacyText&quot;:null,&quot;imageUrl&quot;:&quot;https://one-draw.jp/ijinden/cardlist/002/card/02_032.png&quot;,&quot;expansion&quot;:25,&quot;rarity&quot;:2,&quot;type&quot;:1,&quot;level&quot;:4,&quot;color&quot;:8,&quot;term&quot;:8,&quot;trait&quot;:0,&quot;legacy&quot;:0,&quot;orderTable&quot;:164,&quot;orderDeck&quot;:134}," calcext:value-type="string">
            <text:p>{"id":"2-32","name":"曹操","kana":"そうそう","traitText":null,"ruleText":"自分の戦場の青のイジンがアタッカーになったとき、アタッカー1体を指定して発動できる。指定したアタッカーを破壊して、1ドローする。¶徴募 - この能力は墓地でも発動する。自分のエンドフェイズが開始したとき、このターンにアタッカーが破壊されているなら、自分の手札か自分の墓地のカード1つを指定して発動できる。そのカードをガーディアンにして戦場に置く。","legacyText":null,"imageUrl":"https://one-draw.jp/ijinden/cardlist/002/card/02_032.png","expansion":25,"rarity":2,"type":1,"level":4,"color":8,"term":8,"trait":0,"legacy":0,"orderTable":164,"orderDeck":134},</text:p>
          </table:table-cell>
          <table:table-cell table:number-columns-repeated="16347"/>
        </table:table-row>
        <table:table-row table:style-name="ro2">
          <table:table-cell office:value-type="float" office:value="165" calcext:value-type="float">
            <text:p>165</text:p>
          </table:table-cell>
          <table:table-cell office:value-type="float" office:value="54" calcext:value-type="float">
            <text:p>54</text:p>
          </table:table-cell>
          <table:table-cell office:value-type="string" calcext:value-type="string">
            <text:p>2-33</text:p>
          </table:table-cell>
          <table:table-cell office:value-type="float" office:value="33" calcext:value-type="float">
            <text:p>33</text:p>
          </table:table-cell>
          <table:table-cell office:value-type="string" calcext:value-type="string">
            <text:p>張角</text:p>
          </table:table-cell>
          <table:table-cell office:value-type="string" calcext:value-type="string">
            <text:p>ちょうかく</text:p>
          </table:table-cell>
          <table:table-cell office:value-type="string" calcext:value-type="string">
            <text:p>第２弾ブースターパック</text:p>
          </table:table-cell>
          <table:table-cell table:formula="of:=VLOOKUP([.G166];[$収録番号.$A$1:$収録番号.$B$9];2;0)" office:value-type="float" office:value="25" calcext:value-type="float">
            <text:p>25</text:p>
          </table:table-cell>
          <table:table-cell office:value-type="string" calcext:value-type="string">
            <text:p>N</text:p>
          </table:table-cell>
          <table:table-cell table:formula="of:=VLOOKUP([.I166];[$レアリティ番号.$A$1:$レアリティ番号.$B$4];2;0)" office:value-type="float" office:value="1" calcext:value-type="float">
            <text:p>1</text:p>
          </table:table-cell>
          <table:table-cell office:value-type="string" calcext:value-type="string">
            <text:p>イジン</text:p>
          </table:table-cell>
          <table:table-cell table:formula="of:=VLOOKUP([.K166];[$種類番号.$A$1:$種類番号.$B$4];2;0)" office:value-type="float" office:value="1" calcext:value-type="float">
            <text:p>1</text:p>
          </table:table-cell>
          <table:table-cell office:value-type="string" calcext:value-type="string">
            <text:p>黄</text:p>
          </table:table-cell>
          <table:table-cell table:formula="of:=VLOOKUP([.M166];[$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6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66];[$特性番号.$A$1:$特性番号.$B$8];2;0);0)" office:value-type="float" office:value="0" calcext:value-type="float">
            <text:p>0</text:p>
          </table:table-cell>
          <table:table-cell office:value-type="string" calcext:value-type="string">
            <text:p>これが戦場にいる間、自分の戦場にある「決起」は、自分の魔力ゾーンのマリョクが3つ以上でも発動する。¶これが戦場にいる間、ターンに1回、自分の墓地にある「冥府発動」の遺業能力は、戦場でない場所から墓地に置かれたときでも発動する。</text:p>
          </table:table-cell>
          <table:table-cell table:style-name="ce8" office:value-type="string" calcext:value-type="string">
            <text:p>反魂</text:p>
          </table:table-cell>
          <table:table-cell table:formula="of:=IFERROR(VLOOKUP([.$V166];[$遺業能力番号.$A$1:$遺業能力番号.$B$9];2;0);0)" office:value-type="float" office:value="6" calcext:value-type="float">
            <text:p>6</text:p>
          </table:table-cell>
          <table:table-cell office:value-type="string" calcext:value-type="string">
            <text:p>https://one-draw.jp/ijinden/cardlist/002/card/02_033.png</text:p>
          </table:table-cell>
          <table:table-cell table:formula="of:=CONCATENATE([$JSON.$A$1];[.$C166];[$JSON.$B$1];[.$E166];[$JSON.$C$1];[.$F166];[$JSON.$D$1];IF(ISNA([.$S166]);&quot;null&quot;;&quot;&quot;&quot;&quot;&amp;[.$S166]&amp;&quot;&quot;&quot;&quot;);[$JSON.$E$1];[.$U166];[$JSON.$F$1];IF(ISNA([.$V166]);&quot;null&quot;;&quot;&quot;&quot;&quot;&amp;[.$V166]&amp;&quot;&quot;&quot;&quot;);[$JSON.$G$1];[.$X166];[$JSON.$H$1];[.$H166];[$JSON.$I$1];[.J166];[$JSON.$J$1];[.$L166];[$JSON.$K$1];[.$O166];[$JSON.$L$1];[.$N166];[$JSON.$M$1];[.$R166];[$JSON.$N$1];[.$T166];[$JSON.$O$1];[.$W166];[$JSON.$P$1];[.$A166];[$JSON.$Q$1];[.$B166];[$JSON.$R$1])" office:value-type="string" office:string-value="{&quot;id&quot;:&quot;2-33&quot;,&quot;name&quot;:&quot;張角&quot;,&quot;kana&quot;:&quot;ちょうかく&quot;,&quot;traitText&quot;:null,&quot;ruleText&quot;:&quot;これが戦場にいる間、自分の戦場にある「決起」は、自分の魔力ゾーンのマリョクが3つ以上でも発動する。¶これが戦場にいる間、ターンに1回、自分の墓地にある「冥府発動」の遺業能力は、戦場でない場所から墓地に置かれたときでも発動する。&quot;,&quot;legacyText&quot;:&quot;反魂&quot;,&quot;imageUrl&quot;:&quot;https://one-draw.jp/ijinden/cardlist/002/card/02_033.png&quot;,&quot;expansion&quot;:25,&quot;rarity&quot;:1,&quot;type&quot;:1,&quot;level&quot;:2,&quot;color&quot;:8,&quot;term&quot;:0,&quot;trait&quot;:0,&quot;legacy&quot;:6,&quot;orderTable&quot;:165,&quot;orderDeck&quot;:54}," calcext:value-type="string">
            <text:p>{"id":"2-33","name":"張角","kana":"ちょうかく","traitText":null,"ruleText":"これが戦場にいる間、自分の戦場にある「決起」は、自分の魔力ゾーンのマリョクが3つ以上でも発動する。¶これが戦場にいる間、ターンに1回、自分の墓地にある「冥府発動」の遺業能力は、戦場でない場所から墓地に置かれたときでも発動する。","legacyText":"反魂","imageUrl":"https://one-draw.jp/ijinden/cardlist/002/card/02_033.png","expansion":25,"rarity":1,"type":1,"level":2,"color":8,"term":0,"trait":0,"legacy":6,"orderTable":165,"orderDeck":54},</text:p>
          </table:table-cell>
          <table:table-cell table:number-columns-repeated="16347"/>
        </table:table-row>
        <table:table-row table:style-name="ro2">
          <table:table-cell office:value-type="float" office:value="166" calcext:value-type="float">
            <text:p>166</text:p>
          </table:table-cell>
          <table:table-cell office:value-type="float" office:value="94" calcext:value-type="float">
            <text:p>94</text:p>
          </table:table-cell>
          <table:table-cell office:value-type="string" calcext:value-type="string">
            <text:p>2-34</text:p>
          </table:table-cell>
          <table:table-cell office:value-type="float" office:value="34" calcext:value-type="float">
            <text:p>34</text:p>
          </table:table-cell>
          <table:table-cell office:value-type="string" calcext:value-type="string">
            <text:p>劉備</text:p>
          </table:table-cell>
          <table:table-cell office:value-type="string" calcext:value-type="string">
            <text:p>りゅうび</text:p>
          </table:table-cell>
          <table:table-cell office:value-type="string" calcext:value-type="string">
            <text:p>第２弾ブースターパック</text:p>
          </table:table-cell>
          <table:table-cell table:formula="of:=VLOOKUP([.G167];[$収録番号.$A$1:$収録番号.$B$9];2;0)" office:value-type="float" office:value="25" calcext:value-type="float">
            <text:p>25</text:p>
          </table:table-cell>
          <table:table-cell office:value-type="string" calcext:value-type="string">
            <text:p>N</text:p>
          </table:table-cell>
          <table:table-cell table:formula="of:=VLOOKUP([.I167];[$レアリティ番号.$A$1:$レアリティ番号.$B$4];2;0)" office:value-type="float" office:value="1" calcext:value-type="float">
            <text:p>1</text:p>
          </table:table-cell>
          <table:table-cell office:value-type="string" calcext:value-type="string">
            <text:p>イジン</text:p>
          </table:table-cell>
          <table:table-cell table:formula="of:=VLOOKUP([.K167];[$種類番号.$A$1:$種類番号.$B$4];2;0)" office:value-type="float" office:value="1" calcext:value-type="float">
            <text:p>1</text:p>
          </table:table-cell>
          <table:table-cell office:value-type="string" calcext:value-type="string">
            <text:p>黄</text:p>
          </table:table-cell>
          <table:table-cell table:formula="of:=VLOOKUP([.M167];[$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6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67];[$特性番号.$A$1:$特性番号.$B$8];2;0);0)" office:value-type="float" office:value="0" calcext:value-type="float">
            <text:p>0</text:p>
          </table:table-cell>
          <table:table-cell office:value-type="string" calcext:value-type="string">
            <text:p>自分の戦場の緑のイジンが起きたとき、1ドローする。¶自分のイジン召喚に際し、自分の戦場のイジンを3体まで寝かせてもよい。寝かせた1体につき、手札のイジンは「レベル-1」される。</text:p>
          </table:table-cell>
          <table:table-cell table:style-name="ce8" office:value-type="string" calcext:value-type="string">
            <text:p>1ドローする</text:p>
          </table:table-cell>
          <table:table-cell table:formula="of:=IFERROR(VLOOKUP([.$V167];[$遺業能力番号.$A$1:$遺業能力番号.$B$9];2;0);0)" office:value-type="float" office:value="4" calcext:value-type="float">
            <text:p>4</text:p>
          </table:table-cell>
          <table:table-cell office:value-type="string" calcext:value-type="string">
            <text:p>https://one-draw.jp/ijinden/cardlist/002/card/02_034.png</text:p>
          </table:table-cell>
          <table:table-cell table:formula="of:=CONCATENATE([$JSON.$A$1];[.$C167];[$JSON.$B$1];[.$E167];[$JSON.$C$1];[.$F167];[$JSON.$D$1];IF(ISNA([.$S167]);&quot;null&quot;;&quot;&quot;&quot;&quot;&amp;[.$S167]&amp;&quot;&quot;&quot;&quot;);[$JSON.$E$1];[.$U167];[$JSON.$F$1];IF(ISNA([.$V167]);&quot;null&quot;;&quot;&quot;&quot;&quot;&amp;[.$V167]&amp;&quot;&quot;&quot;&quot;);[$JSON.$G$1];[.$X167];[$JSON.$H$1];[.$H167];[$JSON.$I$1];[.J167];[$JSON.$J$1];[.$L167];[$JSON.$K$1];[.$O167];[$JSON.$L$1];[.$N167];[$JSON.$M$1];[.$R167];[$JSON.$N$1];[.$T167];[$JSON.$O$1];[.$W167];[$JSON.$P$1];[.$A167];[$JSON.$Q$1];[.$B167];[$JSON.$R$1])" office:value-type="string" office:string-value="{&quot;id&quot;:&quot;2-34&quot;,&quot;name&quot;:&quot;劉備&quot;,&quot;kana&quot;:&quot;りゅうび&quot;,&quot;traitText&quot;:null,&quot;ruleText&quot;:&quot;自分の戦場の緑のイジンが起きたとき、1ドローする。¶自分のイジン召喚に際し、自分の戦場のイジンを3体まで寝かせてもよい。寝かせた1体につき、手札のイジンは「レベル-1」される。&quot;,&quot;legacyText&quot;:&quot;1ドローする&quot;,&quot;imageUrl&quot;:&quot;https://one-draw.jp/ijinden/cardlist/002/card/02_034.png&quot;,&quot;expansion&quot;:25,&quot;rarity&quot;:1,&quot;type&quot;:1,&quot;level&quot;:3,&quot;color&quot;:8,&quot;term&quot;:0,&quot;trait&quot;:0,&quot;legacy&quot;:4,&quot;orderTable&quot;:166,&quot;orderDeck&quot;:94}," calcext:value-type="string">
            <text:p>{"id":"2-34","name":"劉備","kana":"りゅうび","traitText":null,"ruleText":"自分の戦場の緑のイジンが起きたとき、1ドローする。¶自分のイジン召喚に際し、自分の戦場のイジンを3体まで寝かせてもよい。寝かせた1体につき、手札のイジンは「レベル-1」される。","legacyText":"1ドローする","imageUrl":"https://one-draw.jp/ijinden/cardlist/002/card/02_034.png","expansion":25,"rarity":1,"type":1,"level":3,"color":8,"term":0,"trait":0,"legacy":4,"orderTable":166,"orderDeck":94},</text:p>
          </table:table-cell>
          <table:table-cell table:number-columns-repeated="16347"/>
        </table:table-row>
        <table:table-row table:style-name="ro2">
          <table:table-cell office:value-type="float" office:value="167" calcext:value-type="float">
            <text:p>167</text:p>
          </table:table-cell>
          <table:table-cell office:value-type="float" office:value="172" calcext:value-type="float">
            <text:p>172</text:p>
          </table:table-cell>
          <table:table-cell office:value-type="string" calcext:value-type="string">
            <text:p>2-35</text:p>
          </table:table-cell>
          <table:table-cell office:value-type="float" office:value="35" calcext:value-type="float">
            <text:p>35</text:p>
          </table:table-cell>
          <table:table-cell office:value-type="string" calcext:value-type="string">
            <text:p>司馬懿</text:p>
          </table:table-cell>
          <table:table-cell office:value-type="string" calcext:value-type="string">
            <text:p>しばい</text:p>
          </table:table-cell>
          <table:table-cell office:value-type="string" calcext:value-type="string">
            <text:p>第２弾ブースターパック</text:p>
          </table:table-cell>
          <table:table-cell table:formula="of:=VLOOKUP([.G168];[$収録番号.$A$1:$収録番号.$B$9];2;0)" office:value-type="float" office:value="25" calcext:value-type="float">
            <text:p>25</text:p>
          </table:table-cell>
          <table:table-cell office:value-type="string" calcext:value-type="string">
            <text:p>N</text:p>
          </table:table-cell>
          <table:table-cell table:formula="of:=VLOOKUP([.I168];[$レアリティ番号.$A$1:$レアリティ番号.$B$4];2;0)" office:value-type="float" office:value="1" calcext:value-type="float">
            <text:p>1</text:p>
          </table:table-cell>
          <table:table-cell office:value-type="string" calcext:value-type="string">
            <text:p>イジン</text:p>
          </table:table-cell>
          <table:table-cell table:formula="of:=VLOOKUP([.K168];[$種類番号.$A$1:$種類番号.$B$4];2;0)" office:value-type="float" office:value="1" calcext:value-type="float">
            <text:p>1</text:p>
          </table:table-cell>
          <table:table-cell office:value-type="string" calcext:value-type="string">
            <text:p>黄</text:p>
          </table:table-cell>
          <table:table-cell table:formula="of:=VLOOKUP([.M168];[$色番号.$A$1:$色番号.$B$10];2;0)" office:value-type="float" office:value="8" calcext:value-type="float">
            <text:p>8</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6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68];[$特性番号.$A$1:$特性番号.$B$8];2;0);0)" office:value-type="float" office:value="0" calcext:value-type="float">
            <text:p>0</text:p>
          </table:table-cell>
          <table:table-cell office:value-type="string" calcext:value-type="string">
            <text:p>自分の墓地にある「徴募」が発動したとき、自分の山札の上から1枚をガーディアンにして戦場に置く。¶ブロック+2000</text:p>
          </table:table-cell>
          <table:table-cell table:style-name="ce8" office:value-type="string" calcext:value-type="string">
            <text:p>1ドローする</text:p>
          </table:table-cell>
          <table:table-cell table:formula="of:=IFERROR(VLOOKUP([.$V168];[$遺業能力番号.$A$1:$遺業能力番号.$B$9];2;0);0)" office:value-type="float" office:value="4" calcext:value-type="float">
            <text:p>4</text:p>
          </table:table-cell>
          <table:table-cell office:value-type="string" calcext:value-type="string">
            <text:p>https://one-draw.jp/ijinden/cardlist/002/card/02_035.png</text:p>
          </table:table-cell>
          <table:table-cell table:formula="of:=CONCATENATE([$JSON.$A$1];[.$C168];[$JSON.$B$1];[.$E168];[$JSON.$C$1];[.$F168];[$JSON.$D$1];IF(ISNA([.$S168]);&quot;null&quot;;&quot;&quot;&quot;&quot;&amp;[.$S168]&amp;&quot;&quot;&quot;&quot;);[$JSON.$E$1];[.$U168];[$JSON.$F$1];IF(ISNA([.$V168]);&quot;null&quot;;&quot;&quot;&quot;&quot;&amp;[.$V168]&amp;&quot;&quot;&quot;&quot;);[$JSON.$G$1];[.$X168];[$JSON.$H$1];[.$H168];[$JSON.$I$1];[.J168];[$JSON.$J$1];[.$L168];[$JSON.$K$1];[.$O168];[$JSON.$L$1];[.$N168];[$JSON.$M$1];[.$R168];[$JSON.$N$1];[.$T168];[$JSON.$O$1];[.$W168];[$JSON.$P$1];[.$A168];[$JSON.$Q$1];[.$B168];[$JSON.$R$1])" office:value-type="string" office:string-value="{&quot;id&quot;:&quot;2-35&quot;,&quot;name&quot;:&quot;司馬懿&quot;,&quot;kana&quot;:&quot;しばい&quot;,&quot;traitText&quot;:null,&quot;ruleText&quot;:&quot;自分の墓地にある「徴募」が発動したとき、自分の山札の上から1枚をガーディアンにして戦場に置く。¶ブロック+2000&quot;,&quot;legacyText&quot;:&quot;1ドローする&quot;,&quot;imageUrl&quot;:&quot;https://one-draw.jp/ijinden/cardlist/002/card/02_035.png&quot;,&quot;expansion&quot;:25,&quot;rarity&quot;:1,&quot;type&quot;:1,&quot;level&quot;:5,&quot;color&quot;:8,&quot;term&quot;:0,&quot;trait&quot;:0,&quot;legacy&quot;:4,&quot;orderTable&quot;:167,&quot;orderDeck&quot;:172}," calcext:value-type="string">
            <text:p>{"id":"2-35","name":"司馬懿","kana":"しばい","traitText":null,"ruleText":"自分の墓地にある「徴募」が発動したとき、自分の山札の上から1枚をガーディアンにして戦場に置く。¶ブロック+2000","legacyText":"1ドローする","imageUrl":"https://one-draw.jp/ijinden/cardlist/002/card/02_035.png","expansion":25,"rarity":1,"type":1,"level":5,"color":8,"term":0,"trait":0,"legacy":4,"orderTable":167,"orderDeck":172},</text:p>
          </table:table-cell>
          <table:table-cell table:number-columns-repeated="16347"/>
        </table:table-row>
        <table:table-row table:style-name="ro2">
          <table:table-cell office:value-type="float" office:value="168" calcext:value-type="float">
            <text:p>168</text:p>
          </table:table-cell>
          <table:table-cell office:value-type="float" office:value="215" calcext:value-type="float">
            <text:p>215</text:p>
          </table:table-cell>
          <table:table-cell office:value-type="string" calcext:value-type="string">
            <text:p>2-36</text:p>
          </table:table-cell>
          <table:table-cell office:value-type="float" office:value="36" calcext:value-type="float">
            <text:p>36</text:p>
          </table:table-cell>
          <table:table-cell office:value-type="string" calcext:value-type="string">
            <text:p>足利義政</text:p>
          </table:table-cell>
          <table:table-cell office:value-type="string" calcext:value-type="string">
            <text:p>あしかがよしまさ</text:p>
          </table:table-cell>
          <table:table-cell office:value-type="string" calcext:value-type="string">
            <text:p>第２弾ブースターパック</text:p>
          </table:table-cell>
          <table:table-cell table:formula="of:=VLOOKUP([.G169];[$収録番号.$A$1:$収録番号.$B$9];2;0)" office:value-type="float" office:value="25" calcext:value-type="float">
            <text:p>25</text:p>
          </table:table-cell>
          <table:table-cell office:value-type="string" calcext:value-type="string">
            <text:p>N</text:p>
          </table:table-cell>
          <table:table-cell table:formula="of:=VLOOKUP([.I169];[$レアリティ番号.$A$1:$レアリティ番号.$B$4];2;0)" office:value-type="float" office:value="1" calcext:value-type="float">
            <text:p>1</text:p>
          </table:table-cell>
          <table:table-cell office:value-type="string" calcext:value-type="string">
            <text:p>イジン</text:p>
          </table:table-cell>
          <table:table-cell table:formula="of:=VLOOKUP([.K169];[$種類番号.$A$1:$種類番号.$B$4];2;0)" office:value-type="float" office:value="1" calcext:value-type="float">
            <text:p>1</text:p>
          </table:table-cell>
          <table:table-cell office:value-type="string" calcext:value-type="string">
            <text:p>黄</text:p>
          </table:table-cell>
          <table:table-cell table:formula="of:=VLOOKUP([.M169];[$色番号.$A$1:$色番号.$B$10];2;0)" office:value-type="float" office:value="8" calcext:value-type="float">
            <text:p>8</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6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69];[$特性番号.$A$1:$特性番号.$B$8];2;0);0)" office:value-type="float" office:value="0" calcext:value-type="float">
            <text:p>0</text:p>
          </table:table-cell>
          <table:table-cell office:value-type="string" calcext:value-type="string">
            <text:p>赤のイジンが自分の戦場に置かれたときに発動できる。2ドローするか、イジン召喚権+2する。</text:p>
          </table:table-cell>
          <table:table-cell table:style-name="ce8" office:value-type="string" calcext:value-type="string">
            <text:p>魔力化</text:p>
          </table:table-cell>
          <table:table-cell table:formula="of:=IFERROR(VLOOKUP([.$V169];[$遺業能力番号.$A$1:$遺業能力番号.$B$9];2;0);0)" office:value-type="float" office:value="1" calcext:value-type="float">
            <text:p>1</text:p>
          </table:table-cell>
          <table:table-cell office:value-type="string" calcext:value-type="string">
            <text:p>https://one-draw.jp/ijinden/cardlist/002/card/02_036.png</text:p>
          </table:table-cell>
          <table:table-cell table:formula="of:=CONCATENATE([$JSON.$A$1];[.$C169];[$JSON.$B$1];[.$E169];[$JSON.$C$1];[.$F169];[$JSON.$D$1];IF(ISNA([.$S169]);&quot;null&quot;;&quot;&quot;&quot;&quot;&amp;[.$S169]&amp;&quot;&quot;&quot;&quot;);[$JSON.$E$1];[.$U169];[$JSON.$F$1];IF(ISNA([.$V169]);&quot;null&quot;;&quot;&quot;&quot;&quot;&amp;[.$V169]&amp;&quot;&quot;&quot;&quot;);[$JSON.$G$1];[.$X169];[$JSON.$H$1];[.$H169];[$JSON.$I$1];[.J169];[$JSON.$J$1];[.$L169];[$JSON.$K$1];[.$O169];[$JSON.$L$1];[.$N169];[$JSON.$M$1];[.$R169];[$JSON.$N$1];[.$T169];[$JSON.$O$1];[.$W169];[$JSON.$P$1];[.$A169];[$JSON.$Q$1];[.$B169];[$JSON.$R$1])" office:value-type="string" office:string-value="{&quot;id&quot;:&quot;2-36&quot;,&quot;name&quot;:&quot;足利義政&quot;,&quot;kana&quot;:&quot;あしかがよしまさ&quot;,&quot;traitText&quot;:null,&quot;ruleText&quot;:&quot;赤のイジンが自分の戦場に置かれたときに発動できる。2ドローするか、イジン召喚権+2する。&quot;,&quot;legacyText&quot;:&quot;魔力化&quot;,&quot;imageUrl&quot;:&quot;https://one-draw.jp/ijinden/cardlist/002/card/02_036.png&quot;,&quot;expansion&quot;:25,&quot;rarity&quot;:1,&quot;type&quot;:1,&quot;level&quot;:7,&quot;color&quot;:8,&quot;term&quot;:0,&quot;trait&quot;:0,&quot;legacy&quot;:1,&quot;orderTable&quot;:168,&quot;orderDeck&quot;:215}," calcext:value-type="string">
            <text:p>{"id":"2-36","name":"足利義政","kana":"あしかがよしまさ","traitText":null,"ruleText":"赤のイジンが自分の戦場に置かれたときに発動できる。2ドローするか、イジン召喚権+2する。","legacyText":"魔力化","imageUrl":"https://one-draw.jp/ijinden/cardlist/002/card/02_036.png","expansion":25,"rarity":1,"type":1,"level":7,"color":8,"term":0,"trait":0,"legacy":1,"orderTable":168,"orderDeck":215},</text:p>
          </table:table-cell>
          <table:table-cell table:number-columns-repeated="16347"/>
        </table:table-row>
        <table:table-row table:style-name="ro2">
          <table:table-cell office:value-type="float" office:value="169" calcext:value-type="float">
            <text:p>169</text:p>
          </table:table-cell>
          <table:table-cell office:value-type="float" office:value="232" calcext:value-type="float">
            <text:p>232</text:p>
          </table:table-cell>
          <table:table-cell office:value-type="string" calcext:value-type="string">
            <text:p>2-37</text:p>
          </table:table-cell>
          <table:table-cell office:value-type="float" office:value="37" calcext:value-type="float">
            <text:p>37</text:p>
          </table:table-cell>
          <table:table-cell office:value-type="string" calcext:value-type="string">
            <text:p>姜維</text:p>
          </table:table-cell>
          <table:table-cell office:value-type="string" calcext:value-type="string">
            <text:p>きょうい</text:p>
          </table:table-cell>
          <table:table-cell office:value-type="string" calcext:value-type="string">
            <text:p>第２弾ブースターパック</text:p>
          </table:table-cell>
          <table:table-cell table:formula="of:=VLOOKUP([.G170];[$収録番号.$A$1:$収録番号.$B$9];2;0)" office:value-type="float" office:value="25" calcext:value-type="float">
            <text:p>25</text:p>
          </table:table-cell>
          <table:table-cell office:value-type="string" calcext:value-type="string">
            <text:p>N</text:p>
          </table:table-cell>
          <table:table-cell table:formula="of:=VLOOKUP([.I170];[$レアリティ番号.$A$1:$レアリティ番号.$B$4];2;0)" office:value-type="float" office:value="1" calcext:value-type="float">
            <text:p>1</text:p>
          </table:table-cell>
          <table:table-cell office:value-type="string" calcext:value-type="string">
            <text:p>イジン</text:p>
          </table:table-cell>
          <table:table-cell table:formula="of:=VLOOKUP([.K170];[$種類番号.$A$1:$種類番号.$B$4];2;0)" office:value-type="float" office:value="1" calcext:value-type="float">
            <text:p>1</text:p>
          </table:table-cell>
          <table:table-cell office:value-type="string" calcext:value-type="string">
            <text:p>黄</text:p>
          </table:table-cell>
          <table:table-cell table:formula="of:=VLOOKUP([.M170];[$色番号.$A$1:$色番号.$B$10];2;0)" office:value-type="float" office:value="8" calcext:value-type="float">
            <text:p>8</text:p>
          </table:table-cell>
          <table:table-cell office:value-type="float" office:value="9" calcext:value-type="float">
            <text:p>9</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7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70];[$特性番号.$A$1:$特性番号.$B$8];2;0);0)" office:value-type="float" office:value="0" calcext:value-type="float">
            <text:p>0</text:p>
          </table:table-cell>
          <table:table-cell office:value-type="string" calcext:value-type="string">
            <text:p>これのイジン召喚に際し、これのレベルは自分の墓地の「反魂」を持つカードの最も高いレベルと同じだけ下がる。¶これが戦場にいる間、自分の戦場の他の黄のイジンは「即応 ウォッチャー パワー+3000」を得る。</text:p>
          </table:table-cell>
          <table:table-cell table:style-name="ce8" table:formula="of:=NA()" office:value-type="string" office:string-value="" calcext:value-type="error">
            <text:p>#N/A</text:p>
          </table:table-cell>
          <table:table-cell table:formula="of:=IFERROR(VLOOKUP([.$V170];[$遺業能力番号.$A$1:$遺業能力番号.$B$9];2;0);0)" office:value-type="float" office:value="0" calcext:value-type="float">
            <text:p>0</text:p>
          </table:table-cell>
          <table:table-cell office:value-type="string" calcext:value-type="string">
            <text:p>https://one-draw.jp/ijinden/cardlist/002/card/02_037.png</text:p>
          </table:table-cell>
          <table:table-cell table:formula="of:=CONCATENATE([$JSON.$A$1];[.$C170];[$JSON.$B$1];[.$E170];[$JSON.$C$1];[.$F170];[$JSON.$D$1];IF(ISNA([.$S170]);&quot;null&quot;;&quot;&quot;&quot;&quot;&amp;[.$S170]&amp;&quot;&quot;&quot;&quot;);[$JSON.$E$1];[.$U170];[$JSON.$F$1];IF(ISNA([.$V170]);&quot;null&quot;;&quot;&quot;&quot;&quot;&amp;[.$V170]&amp;&quot;&quot;&quot;&quot;);[$JSON.$G$1];[.$X170];[$JSON.$H$1];[.$H170];[$JSON.$I$1];[.J170];[$JSON.$J$1];[.$L170];[$JSON.$K$1];[.$O170];[$JSON.$L$1];[.$N170];[$JSON.$M$1];[.$R170];[$JSON.$N$1];[.$T170];[$JSON.$O$1];[.$W170];[$JSON.$P$1];[.$A170];[$JSON.$Q$1];[.$B170];[$JSON.$R$1])" office:value-type="string" office:string-value="{&quot;id&quot;:&quot;2-37&quot;,&quot;name&quot;:&quot;姜維&quot;,&quot;kana&quot;:&quot;きょうい&quot;,&quot;traitText&quot;:null,&quot;ruleText&quot;:&quot;これのイジン召喚に際し、これのレベルは自分の墓地の「反魂」を持つカードの最も高いレベルと同じだけ下がる。¶これが戦場にいる間、自分の戦場の他の黄のイジンは「即応 ウォッチャー パワー+3000」を得る。&quot;,&quot;legacyText&quot;:null,&quot;imageUrl&quot;:&quot;https://one-draw.jp/ijinden/cardlist/002/card/02_037.png&quot;,&quot;expansion&quot;:25,&quot;rarity&quot;:1,&quot;type&quot;:1,&quot;level&quot;:9,&quot;color&quot;:8,&quot;term&quot;:0,&quot;trait&quot;:0,&quot;legacy&quot;:0,&quot;orderTable&quot;:169,&quot;orderDeck&quot;:232}," calcext:value-type="string">
            <text:p>{"id":"2-37","name":"姜維","kana":"きょうい","traitText":null,"ruleText":"これのイジン召喚に際し、これのレベルは自分の墓地の「反魂」を持つカードの最も高いレベルと同じだけ下がる。¶これが戦場にいる間、自分の戦場の他の黄のイジンは「即応 ウォッチャー パワー+3000」を得る。","legacyText":null,"imageUrl":"https://one-draw.jp/ijinden/cardlist/002/card/02_037.png","expansion":25,"rarity":1,"type":1,"level":9,"color":8,"term":0,"trait":0,"legacy":0,"orderTable":169,"orderDeck":232},</text:p>
          </table:table-cell>
          <table:table-cell table:number-columns-repeated="16347"/>
        </table:table-row>
        <table:table-row table:style-name="ro2">
          <table:table-cell office:value-type="float" office:value="170" calcext:value-type="float">
            <text:p>170</text:p>
          </table:table-cell>
          <table:table-cell office:value-type="float" office:value="225" calcext:value-type="float">
            <text:p>225</text:p>
          </table:table-cell>
          <table:table-cell office:value-type="string" calcext:value-type="string">
            <text:p>2-38</text:p>
          </table:table-cell>
          <table:table-cell office:value-type="float" office:value="38" calcext:value-type="float">
            <text:p>38</text:p>
          </table:table-cell>
          <table:table-cell office:value-type="string" calcext:value-type="string">
            <text:p>裴松之</text:p>
          </table:table-cell>
          <table:table-cell office:value-type="string" calcext:value-type="string">
            <text:p>はいしょうし</text:p>
          </table:table-cell>
          <table:table-cell office:value-type="string" calcext:value-type="string">
            <text:p>第２弾ブースターパック</text:p>
          </table:table-cell>
          <table:table-cell table:formula="of:=VLOOKUP([.G171];[$収録番号.$A$1:$収録番号.$B$9];2;0)" office:value-type="float" office:value="25" calcext:value-type="float">
            <text:p>25</text:p>
          </table:table-cell>
          <table:table-cell office:value-type="string" calcext:value-type="string">
            <text:p>R</text:p>
          </table:table-cell>
          <table:table-cell table:formula="of:=VLOOKUP([.I171];[$レアリティ番号.$A$1:$レアリティ番号.$B$4];2;0)" office:value-type="float" office:value="2" calcext:value-type="float">
            <text:p>2</text:p>
          </table:table-cell>
          <table:table-cell office:value-type="string" calcext:value-type="string">
            <text:p>イジン</text:p>
          </table:table-cell>
          <table:table-cell table:formula="of:=VLOOKUP([.K171];[$種類番号.$A$1:$種類番号.$B$4];2;0)" office:value-type="float" office:value="1" calcext:value-type="float">
            <text:p>1</text:p>
          </table:table-cell>
          <table:table-cell office:value-type="string" calcext:value-type="string">
            <text:p>黄</text:p>
          </table:table-cell>
          <table:table-cell table:formula="of:=VLOOKUP([.M171];[$色番号.$A$1:$色番号.$B$10];2;0)" office:value-type="float" office:value="8" calcext:value-type="float">
            <text:p>8</text:p>
          </table:table-cell>
          <table:table-cell office:value-type="float" office:value="8" calcext:value-type="float">
            <text:p>8</text:p>
          </table:table-cell>
          <table:table-cell table:formula="of:=NA()" office:value-type="string" office:string-value="" calcext:value-type="error">
            <text:p>#N/A</text:p>
          </table:table-cell>
          <table:table-cell office:value-type="string" calcext:value-type="string">
            <text:p>執筆</text:p>
          </table:table-cell>
          <table:table-cell table:formula="of:=IFERROR(VLOOKUP([.$Q171];[$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171];[$特性番号.$A$1:$特性番号.$B$8];2;0);0)" office:value-type="float" office:value="0" calcext:value-type="float">
            <text:p>0</text:p>
          </table:table-cell>
          <table:table-cell office:value-type="string" calcext:value-type="string">
            <text:p>これが戦場にいる間、他のカードの「執筆」は発動しない。¶執筆 - ハイケイが戦場に置かれたとき、戦場の「執筆」を持つカード1つにつき1体まで、相手の戦場のイジンを手札に戻す。</text:p>
          </table:table-cell>
          <table:table-cell table:style-name="ce8" office:value-type="string" calcext:value-type="string">
            <text:p>魔力化</text:p>
          </table:table-cell>
          <table:table-cell table:formula="of:=IFERROR(VLOOKUP([.$V171];[$遺業能力番号.$A$1:$遺業能力番号.$B$9];2;0);0)" office:value-type="float" office:value="1" calcext:value-type="float">
            <text:p>1</text:p>
          </table:table-cell>
          <table:table-cell office:value-type="string" calcext:value-type="string">
            <text:p>https://one-draw.jp/ijinden/cardlist/002/card/02_038.png</text:p>
          </table:table-cell>
          <table:table-cell table:formula="of:=CONCATENATE([$JSON.$A$1];[.$C171];[$JSON.$B$1];[.$E171];[$JSON.$C$1];[.$F171];[$JSON.$D$1];IF(ISNA([.$S171]);&quot;null&quot;;&quot;&quot;&quot;&quot;&amp;[.$S171]&amp;&quot;&quot;&quot;&quot;);[$JSON.$E$1];[.$U171];[$JSON.$F$1];IF(ISNA([.$V171]);&quot;null&quot;;&quot;&quot;&quot;&quot;&amp;[.$V171]&amp;&quot;&quot;&quot;&quot;);[$JSON.$G$1];[.$X171];[$JSON.$H$1];[.$H171];[$JSON.$I$1];[.J171];[$JSON.$J$1];[.$L171];[$JSON.$K$1];[.$O171];[$JSON.$L$1];[.$N171];[$JSON.$M$1];[.$R171];[$JSON.$N$1];[.$T171];[$JSON.$O$1];[.$W171];[$JSON.$P$1];[.$A171];[$JSON.$Q$1];[.$B171];[$JSON.$R$1])" office:value-type="string" office:string-value="{&quot;id&quot;:&quot;2-38&quot;,&quot;name&quot;:&quot;裴松之&quot;,&quot;kana&quot;:&quot;はいしょうし&quot;,&quot;traitText&quot;:null,&quot;ruleText&quot;:&quot;これが戦場にいる間、他のカードの「執筆」は発動しない。¶執筆 - ハイケイが戦場に置かれたとき、戦場の「執筆」を持つカード1つにつき1体まで、相手の戦場のイジンを手札に戻す。&quot;,&quot;legacyText&quot;:&quot;魔力化&quot;,&quot;imageUrl&quot;:&quot;https://one-draw.jp/ijinden/cardlist/002/card/02_038.png&quot;,&quot;expansion&quot;:25,&quot;rarity&quot;:2,&quot;type&quot;:1,&quot;level&quot;:8,&quot;color&quot;:8,&quot;term&quot;:2,&quot;trait&quot;:0,&quot;legacy&quot;:1,&quot;orderTable&quot;:170,&quot;orderDeck&quot;:225}," calcext:value-type="string">
            <text:p>{"id":"2-38","name":"裴松之","kana":"はいしょうし","traitText":null,"ruleText":"これが戦場にいる間、他のカードの「執筆」は発動しない。¶執筆 - ハイケイが戦場に置かれたとき、戦場の「執筆」を持つカード1つにつき1体まで、相手の戦場のイジンを手札に戻す。","legacyText":"魔力化","imageUrl":"https://one-draw.jp/ijinden/cardlist/002/card/02_038.png","expansion":25,"rarity":2,"type":1,"level":8,"color":8,"term":2,"trait":0,"legacy":1,"orderTable":170,"orderDeck":225},</text:p>
          </table:table-cell>
          <table:table-cell table:number-columns-repeated="16347"/>
        </table:table-row>
        <table:table-row table:style-name="ro2">
          <table:table-cell office:value-type="float" office:value="171" calcext:value-type="float">
            <text:p>171</text:p>
          </table:table-cell>
          <table:table-cell office:value-type="float" office:value="16" calcext:value-type="float">
            <text:p>16</text:p>
          </table:table-cell>
          <table:table-cell office:value-type="string" calcext:value-type="string">
            <text:p>2-39</text:p>
          </table:table-cell>
          <table:table-cell office:value-type="float" office:value="39" calcext:value-type="float">
            <text:p>39</text:p>
          </table:table-cell>
          <table:table-cell office:value-type="string" calcext:value-type="string">
            <text:p>陳寿</text:p>
          </table:table-cell>
          <table:table-cell office:value-type="string" calcext:value-type="string">
            <text:p>ちんじゅ</text:p>
          </table:table-cell>
          <table:table-cell office:value-type="string" calcext:value-type="string">
            <text:p>第２弾ブースターパック</text:p>
          </table:table-cell>
          <table:table-cell table:formula="of:=VLOOKUP([.G172];[$収録番号.$A$1:$収録番号.$B$9];2;0)" office:value-type="float" office:value="25" calcext:value-type="float">
            <text:p>25</text:p>
          </table:table-cell>
          <table:table-cell office:value-type="string" calcext:value-type="string">
            <text:p>N</text:p>
          </table:table-cell>
          <table:table-cell table:formula="of:=VLOOKUP([.I172];[$レアリティ番号.$A$1:$レアリティ番号.$B$4];2;0)" office:value-type="float" office:value="1" calcext:value-type="float">
            <text:p>1</text:p>
          </table:table-cell>
          <table:table-cell office:value-type="string" calcext:value-type="string">
            <text:p>イジン</text:p>
          </table:table-cell>
          <table:table-cell table:formula="of:=VLOOKUP([.K172];[$種類番号.$A$1:$種類番号.$B$4];2;0)" office:value-type="float" office:value="1" calcext:value-type="float">
            <text:p>1</text:p>
          </table:table-cell>
          <table:table-cell office:value-type="string" calcext:value-type="string">
            <text:p>黄</text:p>
          </table:table-cell>
          <table:table-cell table:formula="of:=VLOOKUP([.M172];[$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office:value-type="string" calcext:value-type="string">
            <text:p>執筆</text:p>
          </table:table-cell>
          <table:table-cell table:formula="of:=IFERROR(VLOOKUP([.$Q172];[$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172];[$特性番号.$A$1:$特性番号.$B$8];2;0);0)" office:value-type="float" office:value="0" calcext:value-type="float">
            <text:p>0</text:p>
          </table:table-cell>
          <table:table-cell office:value-type="string" calcext:value-type="string">
            <text:p>これが戦場にいる間、自分の戦場のイジンは「色：黄」を得る。¶執筆 - ハイケイが戦場に置かれたとき、戦場の黄のイジンが3体以上なら発動する。1ドローする。</text:p>
          </table:table-cell>
          <table:table-cell table:style-name="ce8" office:value-type="string" calcext:value-type="string">
            <text:p>1ドローする</text:p>
          </table:table-cell>
          <table:table-cell table:formula="of:=IFERROR(VLOOKUP([.$V172];[$遺業能力番号.$A$1:$遺業能力番号.$B$9];2;0);0)" office:value-type="float" office:value="4" calcext:value-type="float">
            <text:p>4</text:p>
          </table:table-cell>
          <table:table-cell office:value-type="string" calcext:value-type="string">
            <text:p>https://one-draw.jp/ijinden/cardlist/002/card/02_039.png</text:p>
          </table:table-cell>
          <table:table-cell table:formula="of:=CONCATENATE([$JSON.$A$1];[.$C172];[$JSON.$B$1];[.$E172];[$JSON.$C$1];[.$F172];[$JSON.$D$1];IF(ISNA([.$S172]);&quot;null&quot;;&quot;&quot;&quot;&quot;&amp;[.$S172]&amp;&quot;&quot;&quot;&quot;);[$JSON.$E$1];[.$U172];[$JSON.$F$1];IF(ISNA([.$V172]);&quot;null&quot;;&quot;&quot;&quot;&quot;&amp;[.$V172]&amp;&quot;&quot;&quot;&quot;);[$JSON.$G$1];[.$X172];[$JSON.$H$1];[.$H172];[$JSON.$I$1];[.J172];[$JSON.$J$1];[.$L172];[$JSON.$K$1];[.$O172];[$JSON.$L$1];[.$N172];[$JSON.$M$1];[.$R172];[$JSON.$N$1];[.$T172];[$JSON.$O$1];[.$W172];[$JSON.$P$1];[.$A172];[$JSON.$Q$1];[.$B172];[$JSON.$R$1])" office:value-type="string" office:string-value="{&quot;id&quot;:&quot;2-39&quot;,&quot;name&quot;:&quot;陳寿&quot;,&quot;kana&quot;:&quot;ちんじゅ&quot;,&quot;traitText&quot;:null,&quot;ruleText&quot;:&quot;これが戦場にいる間、自分の戦場のイジンは「色：黄」を得る。¶執筆 - ハイケイが戦場に置かれたとき、戦場の黄のイジンが3体以上なら発動する。1ドローする。&quot;,&quot;legacyText&quot;:&quot;1ドローする&quot;,&quot;imageUrl&quot;:&quot;https://one-draw.jp/ijinden/cardlist/002/card/02_039.png&quot;,&quot;expansion&quot;:25,&quot;rarity&quot;:1,&quot;type&quot;:1,&quot;level&quot;:1,&quot;color&quot;:8,&quot;term&quot;:2,&quot;trait&quot;:0,&quot;legacy&quot;:4,&quot;orderTable&quot;:171,&quot;orderDeck&quot;:16}," calcext:value-type="string">
            <text:p>{"id":"2-39","name":"陳寿","kana":"ちんじゅ","traitText":null,"ruleText":"これが戦場にいる間、自分の戦場のイジンは「色：黄」を得る。¶執筆 - ハイケイが戦場に置かれたとき、戦場の黄のイジンが3体以上なら発動する。1ドローする。","legacyText":"1ドローする","imageUrl":"https://one-draw.jp/ijinden/cardlist/002/card/02_039.png","expansion":25,"rarity":1,"type":1,"level":1,"color":8,"term":2,"trait":0,"legacy":4,"orderTable":171,"orderDeck":16},</text:p>
          </table:table-cell>
          <table:table-cell table:number-columns-repeated="16347"/>
        </table:table-row>
        <table:table-row table:style-name="ro2">
          <table:table-cell office:value-type="float" office:value="172" calcext:value-type="float">
            <text:p>172</text:p>
          </table:table-cell>
          <table:table-cell office:value-type="float" office:value="17" calcext:value-type="float">
            <text:p>17</text:p>
          </table:table-cell>
          <table:table-cell office:value-type="string" calcext:value-type="string">
            <text:p>2-40</text:p>
          </table:table-cell>
          <table:table-cell office:value-type="float" office:value="40" calcext:value-type="float">
            <text:p>40</text:p>
          </table:table-cell>
          <table:table-cell office:value-type="string" calcext:value-type="string">
            <text:p>足利尊氏</text:p>
          </table:table-cell>
          <table:table-cell office:value-type="string" calcext:value-type="string">
            <text:p>あしかがたかうじ</text:p>
          </table:table-cell>
          <table:table-cell office:value-type="string" calcext:value-type="string">
            <text:p>第２弾ブースターパック</text:p>
          </table:table-cell>
          <table:table-cell table:formula="of:=VLOOKUP([.G173];[$収録番号.$A$1:$収録番号.$B$9];2;0)" office:value-type="float" office:value="25" calcext:value-type="float">
            <text:p>25</text:p>
          </table:table-cell>
          <table:table-cell office:value-type="string" calcext:value-type="string">
            <text:p>N</text:p>
          </table:table-cell>
          <table:table-cell table:formula="of:=VLOOKUP([.I173];[$レアリティ番号.$A$1:$レアリティ番号.$B$4];2;0)" office:value-type="float" office:value="1" calcext:value-type="float">
            <text:p>1</text:p>
          </table:table-cell>
          <table:table-cell office:value-type="string" calcext:value-type="string">
            <text:p>イジン</text:p>
          </table:table-cell>
          <table:table-cell table:formula="of:=VLOOKUP([.K173];[$種類番号.$A$1:$種類番号.$B$4];2;0)" office:value-type="float" office:value="1" calcext:value-type="float">
            <text:p>1</text:p>
          </table:table-cell>
          <table:table-cell office:value-type="string" calcext:value-type="string">
            <text:p>黄</text:p>
          </table:table-cell>
          <table:table-cell table:formula="of:=VLOOKUP([.M173];[$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7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73];[$特性番号.$A$1:$特性番号.$B$8];2;0);0)" office:value-type="float" office:value="0" calcext:value-type="float">
            <text:p>0</text:p>
          </table:table-cell>
          <table:table-cell office:value-type="string" calcext:value-type="string">
            <text:p>イジンが相手の戦場に置かれるたび、戦場の「即応」を持つイジン1体を指定して発動できる。そのイジンを寝かせる。</text:p>
          </table:table-cell>
          <table:table-cell table:style-name="ce8" office:value-type="string" calcext:value-type="string">
            <text:p>1ドローする</text:p>
          </table:table-cell>
          <table:table-cell table:formula="of:=IFERROR(VLOOKUP([.$V173];[$遺業能力番号.$A$1:$遺業能力番号.$B$9];2;0);0)" office:value-type="float" office:value="4" calcext:value-type="float">
            <text:p>4</text:p>
          </table:table-cell>
          <table:table-cell office:value-type="string" calcext:value-type="string">
            <text:p>https://one-draw.jp/ijinden/cardlist/002/card/02_040.png</text:p>
          </table:table-cell>
          <table:table-cell table:formula="of:=CONCATENATE([$JSON.$A$1];[.$C173];[$JSON.$B$1];[.$E173];[$JSON.$C$1];[.$F173];[$JSON.$D$1];IF(ISNA([.$S173]);&quot;null&quot;;&quot;&quot;&quot;&quot;&amp;[.$S173]&amp;&quot;&quot;&quot;&quot;);[$JSON.$E$1];[.$U173];[$JSON.$F$1];IF(ISNA([.$V173]);&quot;null&quot;;&quot;&quot;&quot;&quot;&amp;[.$V173]&amp;&quot;&quot;&quot;&quot;);[$JSON.$G$1];[.$X173];[$JSON.$H$1];[.$H173];[$JSON.$I$1];[.J173];[$JSON.$J$1];[.$L173];[$JSON.$K$1];[.$O173];[$JSON.$L$1];[.$N173];[$JSON.$M$1];[.$R173];[$JSON.$N$1];[.$T173];[$JSON.$O$1];[.$W173];[$JSON.$P$1];[.$A173];[$JSON.$Q$1];[.$B173];[$JSON.$R$1])" office:value-type="string" office:string-value="{&quot;id&quot;:&quot;2-40&quot;,&quot;name&quot;:&quot;足利尊氏&quot;,&quot;kana&quot;:&quot;あしかがたかうじ&quot;,&quot;traitText&quot;:null,&quot;ruleText&quot;:&quot;イジンが相手の戦場に置かれるたび、戦場の「即応」を持つイジン1体を指定して発動できる。そのイジンを寝かせる。&quot;,&quot;legacyText&quot;:&quot;1ドローする&quot;,&quot;imageUrl&quot;:&quot;https://one-draw.jp/ijinden/cardlist/002/card/02_040.png&quot;,&quot;expansion&quot;:25,&quot;rarity&quot;:1,&quot;type&quot;:1,&quot;level&quot;:1,&quot;color&quot;:8,&quot;term&quot;:0,&quot;trait&quot;:0,&quot;legacy&quot;:4,&quot;orderTable&quot;:172,&quot;orderDeck&quot;:17}," calcext:value-type="string">
            <text:p>{"id":"2-40","name":"足利尊氏","kana":"あしかがたかうじ","traitText":null,"ruleText":"イジンが相手の戦場に置かれるたび、戦場の「即応」を持つイジン1体を指定して発動できる。そのイジンを寝かせる。","legacyText":"1ドローする","imageUrl":"https://one-draw.jp/ijinden/cardlist/002/card/02_040.png","expansion":25,"rarity":1,"type":1,"level":1,"color":8,"term":0,"trait":0,"legacy":4,"orderTable":172,"orderDeck":17},</text:p>
          </table:table-cell>
          <table:table-cell table:number-columns-repeated="16347"/>
        </table:table-row>
        <table:table-row table:style-name="ro2">
          <table:table-cell office:value-type="float" office:value="173" calcext:value-type="float">
            <text:p>173</text:p>
          </table:table-cell>
          <table:table-cell office:value-type="float" office:value="18" calcext:value-type="float">
            <text:p>18</text:p>
          </table:table-cell>
          <table:table-cell office:value-type="string" calcext:value-type="string">
            <text:p>2-41</text:p>
          </table:table-cell>
          <table:table-cell office:value-type="float" office:value="41" calcext:value-type="float">
            <text:p>41</text:p>
          </table:table-cell>
          <table:table-cell office:value-type="string" calcext:value-type="string">
            <text:p>カール・マルクス</text:p>
          </table:table-cell>
          <table:table-cell office:value-type="string" calcext:value-type="string">
            <text:p>かーるまるくす</text:p>
          </table:table-cell>
          <table:table-cell office:value-type="string" calcext:value-type="string">
            <text:p>第２弾ブースターパック</text:p>
          </table:table-cell>
          <table:table-cell table:formula="of:=VLOOKUP([.G174];[$収録番号.$A$1:$収録番号.$B$9];2;0)" office:value-type="float" office:value="25" calcext:value-type="float">
            <text:p>25</text:p>
          </table:table-cell>
          <table:table-cell office:value-type="string" calcext:value-type="string">
            <text:p>N</text:p>
          </table:table-cell>
          <table:table-cell table:formula="of:=VLOOKUP([.I174];[$レアリティ番号.$A$1:$レアリティ番号.$B$4];2;0)" office:value-type="float" office:value="1" calcext:value-type="float">
            <text:p>1</text:p>
          </table:table-cell>
          <table:table-cell office:value-type="string" calcext:value-type="string">
            <text:p>イジン</text:p>
          </table:table-cell>
          <table:table-cell table:formula="of:=VLOOKUP([.K174];[$種類番号.$A$1:$種類番号.$B$4];2;0)" office:value-type="float" office:value="1" calcext:value-type="float">
            <text:p>1</text:p>
          </table:table-cell>
          <table:table-cell office:value-type="string" calcext:value-type="string">
            <text:p>黄</text:p>
          </table:table-cell>
          <table:table-cell table:formula="of:=VLOOKUP([.M174];[$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7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74];[$特性番号.$A$1:$特性番号.$B$8];2;0);0)" office:value-type="float" office:value="0" calcext:value-type="float">
            <text:p>0</text:p>
          </table:table-cell>
          <table:table-cell office:value-type="string" calcext:value-type="string">
            <text:p>自分のメインフェイズが開始したとき、自分の手札の『ストーン』マリョク1つを相手に見せて発動できる。マリョク配置権+1する。</text:p>
          </table:table-cell>
          <table:table-cell table:style-name="ce8" office:value-type="string" calcext:value-type="string">
            <text:p>反魂</text:p>
          </table:table-cell>
          <table:table-cell table:formula="of:=IFERROR(VLOOKUP([.$V174];[$遺業能力番号.$A$1:$遺業能力番号.$B$9];2;0);0)" office:value-type="float" office:value="6" calcext:value-type="float">
            <text:p>6</text:p>
          </table:table-cell>
          <table:table-cell office:value-type="string" calcext:value-type="string">
            <text:p>https://one-draw.jp/ijinden/cardlist/002/card/02_041.png</text:p>
          </table:table-cell>
          <table:table-cell table:formula="of:=CONCATENATE([$JSON.$A$1];[.$C174];[$JSON.$B$1];[.$E174];[$JSON.$C$1];[.$F174];[$JSON.$D$1];IF(ISNA([.$S174]);&quot;null&quot;;&quot;&quot;&quot;&quot;&amp;[.$S174]&amp;&quot;&quot;&quot;&quot;);[$JSON.$E$1];[.$U174];[$JSON.$F$1];IF(ISNA([.$V174]);&quot;null&quot;;&quot;&quot;&quot;&quot;&amp;[.$V174]&amp;&quot;&quot;&quot;&quot;);[$JSON.$G$1];[.$X174];[$JSON.$H$1];[.$H174];[$JSON.$I$1];[.J174];[$JSON.$J$1];[.$L174];[$JSON.$K$1];[.$O174];[$JSON.$L$1];[.$N174];[$JSON.$M$1];[.$R174];[$JSON.$N$1];[.$T174];[$JSON.$O$1];[.$W174];[$JSON.$P$1];[.$A174];[$JSON.$Q$1];[.$B174];[$JSON.$R$1])" office:value-type="string" office:string-value="{&quot;id&quot;:&quot;2-41&quot;,&quot;name&quot;:&quot;カール・マルクス&quot;,&quot;kana&quot;:&quot;かーるまるくす&quot;,&quot;traitText&quot;:null,&quot;ruleText&quot;:&quot;自分のメインフェイズが開始したとき、自分の手札の『ストーン』マリョク1つを相手に見せて発動できる。マリョク配置権+1する。&quot;,&quot;legacyText&quot;:&quot;反魂&quot;,&quot;imageUrl&quot;:&quot;https://one-draw.jp/ijinden/cardlist/002/card/02_041.png&quot;,&quot;expansion&quot;:25,&quot;rarity&quot;:1,&quot;type&quot;:1,&quot;level&quot;:1,&quot;color&quot;:8,&quot;term&quot;:0,&quot;trait&quot;:0,&quot;legacy&quot;:6,&quot;orderTable&quot;:173,&quot;orderDeck&quot;:18}," calcext:value-type="string">
            <text:p>{"id":"2-41","name":"カール・マルクス","kana":"かーるまるくす","traitText":null,"ruleText":"自分のメインフェイズが開始したとき、自分の手札の『ストーン』マリョク1つを相手に見せて発動できる。マリョク配置権+1する。","legacyText":"反魂","imageUrl":"https://one-draw.jp/ijinden/cardlist/002/card/02_041.png","expansion":25,"rarity":1,"type":1,"level":1,"color":8,"term":0,"trait":0,"legacy":6,"orderTable":173,"orderDeck":18},</text:p>
          </table:table-cell>
          <table:table-cell table:number-columns-repeated="16347"/>
        </table:table-row>
        <table:table-row table:style-name="ro2">
          <table:table-cell office:value-type="float" office:value="174" calcext:value-type="float">
            <text:p>174</text:p>
          </table:table-cell>
          <table:table-cell office:value-type="float" office:value="95" calcext:value-type="float">
            <text:p>95</text:p>
          </table:table-cell>
          <table:table-cell office:value-type="string" calcext:value-type="string">
            <text:p>2-42</text:p>
          </table:table-cell>
          <table:table-cell office:value-type="float" office:value="42" calcext:value-type="float">
            <text:p>42</text:p>
          </table:table-cell>
          <table:table-cell office:value-type="string" calcext:value-type="string">
            <text:p>足利義満</text:p>
          </table:table-cell>
          <table:table-cell office:value-type="string" calcext:value-type="string">
            <text:p>あしかがよしみつ</text:p>
          </table:table-cell>
          <table:table-cell office:value-type="string" calcext:value-type="string">
            <text:p>第２弾ブースターパック</text:p>
          </table:table-cell>
          <table:table-cell table:formula="of:=VLOOKUP([.G175];[$収録番号.$A$1:$収録番号.$B$9];2;0)" office:value-type="float" office:value="25" calcext:value-type="float">
            <text:p>25</text:p>
          </table:table-cell>
          <table:table-cell office:value-type="string" calcext:value-type="string">
            <text:p>R</text:p>
          </table:table-cell>
          <table:table-cell table:formula="of:=VLOOKUP([.I175];[$レアリティ番号.$A$1:$レアリティ番号.$B$4];2;0)" office:value-type="float" office:value="2" calcext:value-type="float">
            <text:p>2</text:p>
          </table:table-cell>
          <table:table-cell office:value-type="string" calcext:value-type="string">
            <text:p>イジン</text:p>
          </table:table-cell>
          <table:table-cell table:formula="of:=VLOOKUP([.K175];[$種類番号.$A$1:$種類番号.$B$4];2;0)" office:value-type="float" office:value="1" calcext:value-type="float">
            <text:p>1</text:p>
          </table:table-cell>
          <table:table-cell office:value-type="string" calcext:value-type="string">
            <text:p>黄</text:p>
          </table:table-cell>
          <table:table-cell table:formula="of:=VLOOKUP([.M175];[$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7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75];[$特性番号.$A$1:$特性番号.$B$8];2;0);0)" office:value-type="float" office:value="0" calcext:value-type="float">
            <text:p>0</text:p>
          </table:table-cell>
          <table:table-cell office:value-type="string" calcext:value-type="string">
            <text:p>これが戦場にいる間、自分の戦場の他のイジンは「アタック+1000」を得る。¶これが戦場にいる間、自分の戦場のパワー3000以上のイジンは「航海 - アタッカーになったとき、1ドローする。」を得る。</text:p>
          </table:table-cell>
          <table:table-cell table:style-name="ce8" office:value-type="string" calcext:value-type="string">
            <text:p>1ドローする</text:p>
          </table:table-cell>
          <table:table-cell table:formula="of:=IFERROR(VLOOKUP([.$V175];[$遺業能力番号.$A$1:$遺業能力番号.$B$9];2;0);0)" office:value-type="float" office:value="4" calcext:value-type="float">
            <text:p>4</text:p>
          </table:table-cell>
          <table:table-cell office:value-type="string" calcext:value-type="string">
            <text:p>https://one-draw.jp/ijinden/cardlist/002/card/02_042.png</text:p>
          </table:table-cell>
          <table:table-cell table:formula="of:=CONCATENATE([$JSON.$A$1];[.$C175];[$JSON.$B$1];[.$E175];[$JSON.$C$1];[.$F175];[$JSON.$D$1];IF(ISNA([.$S175]);&quot;null&quot;;&quot;&quot;&quot;&quot;&amp;[.$S175]&amp;&quot;&quot;&quot;&quot;);[$JSON.$E$1];[.$U175];[$JSON.$F$1];IF(ISNA([.$V175]);&quot;null&quot;;&quot;&quot;&quot;&quot;&amp;[.$V175]&amp;&quot;&quot;&quot;&quot;);[$JSON.$G$1];[.$X175];[$JSON.$H$1];[.$H175];[$JSON.$I$1];[.J175];[$JSON.$J$1];[.$L175];[$JSON.$K$1];[.$O175];[$JSON.$L$1];[.$N175];[$JSON.$M$1];[.$R175];[$JSON.$N$1];[.$T175];[$JSON.$O$1];[.$W175];[$JSON.$P$1];[.$A175];[$JSON.$Q$1];[.$B175];[$JSON.$R$1])" office:value-type="string" office:string-value="{&quot;id&quot;:&quot;2-42&quot;,&quot;name&quot;:&quot;足利義満&quot;,&quot;kana&quot;:&quot;あしかがよしみつ&quot;,&quot;traitText&quot;:null,&quot;ruleText&quot;:&quot;これが戦場にいる間、自分の戦場の他のイジンは「アタック+1000」を得る。¶これが戦場にいる間、自分の戦場のパワー3000以上のイジンは「航海 - アタッカーになったとき、1ドローする。」を得る。&quot;,&quot;legacyText&quot;:&quot;1ドローする&quot;,&quot;imageUrl&quot;:&quot;https://one-draw.jp/ijinden/cardlist/002/card/02_042.png&quot;,&quot;expansion&quot;:25,&quot;rarity&quot;:2,&quot;type&quot;:1,&quot;level&quot;:3,&quot;color&quot;:8,&quot;term&quot;:0,&quot;trait&quot;:0,&quot;legacy&quot;:4,&quot;orderTable&quot;:174,&quot;orderDeck&quot;:95}," calcext:value-type="string">
            <text:p>{"id":"2-42","name":"足利義満","kana":"あしかがよしみつ","traitText":null,"ruleText":"これが戦場にいる間、自分の戦場の他のイジンは「アタック+1000」を得る。¶これが戦場にいる間、自分の戦場のパワー3000以上のイジンは「航海 - アタッカーになったとき、1ドローする。」を得る。","legacyText":"1ドローする","imageUrl":"https://one-draw.jp/ijinden/cardlist/002/card/02_042.png","expansion":25,"rarity":2,"type":1,"level":3,"color":8,"term":0,"trait":0,"legacy":4,"orderTable":174,"orderDeck":95},</text:p>
          </table:table-cell>
          <table:table-cell table:number-columns-repeated="16347"/>
        </table:table-row>
        <table:table-row table:style-name="ro2">
          <table:table-cell office:value-type="float" office:value="175" calcext:value-type="float">
            <text:p>175</text:p>
          </table:table-cell>
          <table:table-cell office:value-type="float" office:value="96" calcext:value-type="float">
            <text:p>96</text:p>
          </table:table-cell>
          <table:table-cell office:value-type="string" calcext:value-type="string">
            <text:p>2-43</text:p>
          </table:table-cell>
          <table:table-cell office:value-type="float" office:value="43" calcext:value-type="float">
            <text:p>43</text:p>
          </table:table-cell>
          <table:table-cell office:value-type="string" calcext:value-type="string">
            <text:p>観阿弥</text:p>
          </table:table-cell>
          <table:table-cell office:value-type="string" calcext:value-type="string">
            <text:p>かんあみ</text:p>
          </table:table-cell>
          <table:table-cell office:value-type="string" calcext:value-type="string">
            <text:p>第２弾ブースターパック</text:p>
          </table:table-cell>
          <table:table-cell table:formula="of:=VLOOKUP([.G176];[$収録番号.$A$1:$収録番号.$B$9];2;0)" office:value-type="float" office:value="25" calcext:value-type="float">
            <text:p>25</text:p>
          </table:table-cell>
          <table:table-cell office:value-type="string" calcext:value-type="string">
            <text:p>N</text:p>
          </table:table-cell>
          <table:table-cell table:formula="of:=VLOOKUP([.I176];[$レアリティ番号.$A$1:$レアリティ番号.$B$4];2;0)" office:value-type="float" office:value="1" calcext:value-type="float">
            <text:p>1</text:p>
          </table:table-cell>
          <table:table-cell office:value-type="string" calcext:value-type="string">
            <text:p>イジン</text:p>
          </table:table-cell>
          <table:table-cell table:formula="of:=VLOOKUP([.K176];[$種類番号.$A$1:$種類番号.$B$4];2;0)" office:value-type="float" office:value="1" calcext:value-type="float">
            <text:p>1</text:p>
          </table:table-cell>
          <table:table-cell office:value-type="string" calcext:value-type="string">
            <text:p>黄</text:p>
          </table:table-cell>
          <table:table-cell table:formula="of:=VLOOKUP([.M176];[$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7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76];[$特性番号.$A$1:$特性番号.$B$8];2;0);0)" office:value-type="float" office:value="0" calcext:value-type="float">
            <text:p>0</text:p>
          </table:table-cell>
          <table:table-cell office:value-type="string" calcext:value-type="string">
            <text:p>ウォッチャー¶レベル4以上のイジンが自分の戦場にいる間「パワー+2000」を得る。</text:p>
          </table:table-cell>
          <table:table-cell table:style-name="ce8" office:value-type="string" calcext:value-type="string">
            <text:p>1ドローする</text:p>
          </table:table-cell>
          <table:table-cell table:formula="of:=IFERROR(VLOOKUP([.$V176];[$遺業能力番号.$A$1:$遺業能力番号.$B$9];2;0);0)" office:value-type="float" office:value="4" calcext:value-type="float">
            <text:p>4</text:p>
          </table:table-cell>
          <table:table-cell office:value-type="string" calcext:value-type="string">
            <text:p>https://one-draw.jp/ijinden/cardlist/002/card/02_043.png</text:p>
          </table:table-cell>
          <table:table-cell table:formula="of:=CONCATENATE([$JSON.$A$1];[.$C176];[$JSON.$B$1];[.$E176];[$JSON.$C$1];[.$F176];[$JSON.$D$1];IF(ISNA([.$S176]);&quot;null&quot;;&quot;&quot;&quot;&quot;&amp;[.$S176]&amp;&quot;&quot;&quot;&quot;);[$JSON.$E$1];[.$U176];[$JSON.$F$1];IF(ISNA([.$V176]);&quot;null&quot;;&quot;&quot;&quot;&quot;&amp;[.$V176]&amp;&quot;&quot;&quot;&quot;);[$JSON.$G$1];[.$X176];[$JSON.$H$1];[.$H176];[$JSON.$I$1];[.J176];[$JSON.$J$1];[.$L176];[$JSON.$K$1];[.$O176];[$JSON.$L$1];[.$N176];[$JSON.$M$1];[.$R176];[$JSON.$N$1];[.$T176];[$JSON.$O$1];[.$W176];[$JSON.$P$1];[.$A176];[$JSON.$Q$1];[.$B176];[$JSON.$R$1])" office:value-type="string" office:string-value="{&quot;id&quot;:&quot;2-43&quot;,&quot;name&quot;:&quot;観阿弥&quot;,&quot;kana&quot;:&quot;かんあみ&quot;,&quot;traitText&quot;:null,&quot;ruleText&quot;:&quot;ウォッチャー¶レベル4以上のイジンが自分の戦場にいる間「パワー+2000」を得る。&quot;,&quot;legacyText&quot;:&quot;1ドローする&quot;,&quot;imageUrl&quot;:&quot;https://one-draw.jp/ijinden/cardlist/002/card/02_043.png&quot;,&quot;expansion&quot;:25,&quot;rarity&quot;:1,&quot;type&quot;:1,&quot;level&quot;:3,&quot;color&quot;:8,&quot;term&quot;:0,&quot;trait&quot;:0,&quot;legacy&quot;:4,&quot;orderTable&quot;:175,&quot;orderDeck&quot;:96}," calcext:value-type="string">
            <text:p>{"id":"2-43","name":"観阿弥","kana":"かんあみ","traitText":null,"ruleText":"ウォッチャー¶レベル4以上のイジンが自分の戦場にいる間「パワー+2000」を得る。","legacyText":"1ドローする","imageUrl":"https://one-draw.jp/ijinden/cardlist/002/card/02_043.png","expansion":25,"rarity":1,"type":1,"level":3,"color":8,"term":0,"trait":0,"legacy":4,"orderTable":175,"orderDeck":96},</text:p>
          </table:table-cell>
          <table:table-cell table:number-columns-repeated="16347"/>
        </table:table-row>
        <table:table-row table:style-name="ro2">
          <table:table-cell office:value-type="float" office:value="176" calcext:value-type="float">
            <text:p>176</text:p>
          </table:table-cell>
          <table:table-cell office:value-type="float" office:value="135" calcext:value-type="float">
            <text:p>135</text:p>
          </table:table-cell>
          <table:table-cell office:value-type="string" calcext:value-type="string">
            <text:p>2-44</text:p>
          </table:table-cell>
          <table:table-cell office:value-type="float" office:value="44" calcext:value-type="float">
            <text:p>44</text:p>
          </table:table-cell>
          <table:table-cell office:value-type="string" calcext:value-type="string">
            <text:p>世阿弥</text:p>
          </table:table-cell>
          <table:table-cell office:value-type="string" calcext:value-type="string">
            <text:p>ぜあみ</text:p>
          </table:table-cell>
          <table:table-cell office:value-type="string" calcext:value-type="string">
            <text:p>第２弾ブースターパック</text:p>
          </table:table-cell>
          <table:table-cell table:formula="of:=VLOOKUP([.G177];[$収録番号.$A$1:$収録番号.$B$9];2;0)" office:value-type="float" office:value="25" calcext:value-type="float">
            <text:p>25</text:p>
          </table:table-cell>
          <table:table-cell office:value-type="string" calcext:value-type="string">
            <text:p>N</text:p>
          </table:table-cell>
          <table:table-cell table:formula="of:=VLOOKUP([.I177];[$レアリティ番号.$A$1:$レアリティ番号.$B$4];2;0)" office:value-type="float" office:value="1" calcext:value-type="float">
            <text:p>1</text:p>
          </table:table-cell>
          <table:table-cell office:value-type="string" calcext:value-type="string">
            <text:p>イジン</text:p>
          </table:table-cell>
          <table:table-cell table:formula="of:=VLOOKUP([.K177];[$種類番号.$A$1:$種類番号.$B$4];2;0)" office:value-type="float" office:value="1" calcext:value-type="float">
            <text:p>1</text:p>
          </table:table-cell>
          <table:table-cell office:value-type="string" calcext:value-type="string">
            <text:p>黄</text:p>
          </table:table-cell>
          <table:table-cell table:formula="of:=VLOOKUP([.M177];[$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7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77];[$特性番号.$A$1:$特性番号.$B$8];2;0);0)" office:value-type="float" office:value="0" calcext:value-type="float">
            <text:p>0</text:p>
          </table:table-cell>
          <table:table-cell office:value-type="string" calcext:value-type="string">
            <text:p>ウォッチャー¶レベル3以下のイジンが自分の戦場にいる間「即応 パワー+2000」を得る。</text:p>
          </table:table-cell>
          <table:table-cell table:style-name="ce8" office:value-type="string" calcext:value-type="string">
            <text:p>1ドローする</text:p>
          </table:table-cell>
          <table:table-cell table:formula="of:=IFERROR(VLOOKUP([.$V177];[$遺業能力番号.$A$1:$遺業能力番号.$B$9];2;0);0)" office:value-type="float" office:value="4" calcext:value-type="float">
            <text:p>4</text:p>
          </table:table-cell>
          <table:table-cell office:value-type="string" calcext:value-type="string">
            <text:p>https://one-draw.jp/ijinden/cardlist/002/card/02_044.png</text:p>
          </table:table-cell>
          <table:table-cell table:formula="of:=CONCATENATE([$JSON.$A$1];[.$C177];[$JSON.$B$1];[.$E177];[$JSON.$C$1];[.$F177];[$JSON.$D$1];IF(ISNA([.$S177]);&quot;null&quot;;&quot;&quot;&quot;&quot;&amp;[.$S177]&amp;&quot;&quot;&quot;&quot;);[$JSON.$E$1];[.$U177];[$JSON.$F$1];IF(ISNA([.$V177]);&quot;null&quot;;&quot;&quot;&quot;&quot;&amp;[.$V177]&amp;&quot;&quot;&quot;&quot;);[$JSON.$G$1];[.$X177];[$JSON.$H$1];[.$H177];[$JSON.$I$1];[.J177];[$JSON.$J$1];[.$L177];[$JSON.$K$1];[.$O177];[$JSON.$L$1];[.$N177];[$JSON.$M$1];[.$R177];[$JSON.$N$1];[.$T177];[$JSON.$O$1];[.$W177];[$JSON.$P$1];[.$A177];[$JSON.$Q$1];[.$B177];[$JSON.$R$1])" office:value-type="string" office:string-value="{&quot;id&quot;:&quot;2-44&quot;,&quot;name&quot;:&quot;世阿弥&quot;,&quot;kana&quot;:&quot;ぜあみ&quot;,&quot;traitText&quot;:null,&quot;ruleText&quot;:&quot;ウォッチャー¶レベル3以下のイジンが自分の戦場にいる間「即応 パワー+2000」を得る。&quot;,&quot;legacyText&quot;:&quot;1ドローする&quot;,&quot;imageUrl&quot;:&quot;https://one-draw.jp/ijinden/cardlist/002/card/02_044.png&quot;,&quot;expansion&quot;:25,&quot;rarity&quot;:1,&quot;type&quot;:1,&quot;level&quot;:4,&quot;color&quot;:8,&quot;term&quot;:0,&quot;trait&quot;:0,&quot;legacy&quot;:4,&quot;orderTable&quot;:176,&quot;orderDeck&quot;:135}," calcext:value-type="string">
            <text:p>{"id":"2-44","name":"世阿弥","kana":"ぜあみ","traitText":null,"ruleText":"ウォッチャー¶レベル3以下のイジンが自分の戦場にいる間「即応 パワー+2000」を得る。","legacyText":"1ドローする","imageUrl":"https://one-draw.jp/ijinden/cardlist/002/card/02_044.png","expansion":25,"rarity":1,"type":1,"level":4,"color":8,"term":0,"trait":0,"legacy":4,"orderTable":176,"orderDeck":135},</text:p>
          </table:table-cell>
          <table:table-cell table:number-columns-repeated="16347"/>
        </table:table-row>
        <table:table-row table:style-name="ro2">
          <table:table-cell office:value-type="float" office:value="177" calcext:value-type="float">
            <text:p>177</text:p>
          </table:table-cell>
          <table:table-cell office:value-type="float" office:value="55" calcext:value-type="float">
            <text:p>55</text:p>
          </table:table-cell>
          <table:table-cell office:value-type="string" calcext:value-type="string">
            <text:p>2-45</text:p>
          </table:table-cell>
          <table:table-cell office:value-type="float" office:value="45" calcext:value-type="float">
            <text:p>45</text:p>
          </table:table-cell>
          <table:table-cell office:value-type="string" calcext:value-type="string">
            <text:p>新井白石</text:p>
          </table:table-cell>
          <table:table-cell office:value-type="string" calcext:value-type="string">
            <text:p>あらいはくせき</text:p>
          </table:table-cell>
          <table:table-cell office:value-type="string" calcext:value-type="string">
            <text:p>第２弾ブースターパック</text:p>
          </table:table-cell>
          <table:table-cell table:formula="of:=VLOOKUP([.G178];[$収録番号.$A$1:$収録番号.$B$9];2;0)" office:value-type="float" office:value="25" calcext:value-type="float">
            <text:p>25</text:p>
          </table:table-cell>
          <table:table-cell office:value-type="string" calcext:value-type="string">
            <text:p>R</text:p>
          </table:table-cell>
          <table:table-cell table:formula="of:=VLOOKUP([.I178];[$レアリティ番号.$A$1:$レアリティ番号.$B$4];2;0)" office:value-type="float" office:value="2" calcext:value-type="float">
            <text:p>2</text:p>
          </table:table-cell>
          <table:table-cell office:value-type="string" calcext:value-type="string">
            <text:p>イジン</text:p>
          </table:table-cell>
          <table:table-cell table:formula="of:=VLOOKUP([.K178];[$種類番号.$A$1:$種類番号.$B$4];2;0)" office:value-type="float" office:value="1" calcext:value-type="float">
            <text:p>1</text:p>
          </table:table-cell>
          <table:table-cell office:value-type="string" calcext:value-type="string">
            <text:p>黄</text:p>
          </table:table-cell>
          <table:table-cell table:formula="of:=VLOOKUP([.M178];[$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7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78];[$特性番号.$A$1:$特性番号.$B$8];2;0);0)" office:value-type="float" office:value="0" calcext:value-type="float">
            <text:p>0</text:p>
          </table:table-cell>
          <table:table-cell office:value-type="string" calcext:value-type="string">
            <text:p>ハイケイが相手の戦場に置かれる際、そのハイケイは寝ている状態で戦場に置かれる。¶相手の戦場の寝ているハイケイは、能力すべてを失う。この能力は、能力によって失われない。</text:p>
          </table:table-cell>
          <table:table-cell table:style-name="ce8" office:value-type="string" calcext:value-type="string">
            <text:p>1ドローする</text:p>
          </table:table-cell>
          <table:table-cell table:formula="of:=IFERROR(VLOOKUP([.$V178];[$遺業能力番号.$A$1:$遺業能力番号.$B$9];2;0);0)" office:value-type="float" office:value="4" calcext:value-type="float">
            <text:p>4</text:p>
          </table:table-cell>
          <table:table-cell office:value-type="string" calcext:value-type="string">
            <text:p>https://one-draw.jp/ijinden/cardlist/002/card/02_045.png</text:p>
          </table:table-cell>
          <table:table-cell table:formula="of:=CONCATENATE([$JSON.$A$1];[.$C178];[$JSON.$B$1];[.$E178];[$JSON.$C$1];[.$F178];[$JSON.$D$1];IF(ISNA([.$S178]);&quot;null&quot;;&quot;&quot;&quot;&quot;&amp;[.$S178]&amp;&quot;&quot;&quot;&quot;);[$JSON.$E$1];[.$U178];[$JSON.$F$1];IF(ISNA([.$V178]);&quot;null&quot;;&quot;&quot;&quot;&quot;&amp;[.$V178]&amp;&quot;&quot;&quot;&quot;);[$JSON.$G$1];[.$X178];[$JSON.$H$1];[.$H178];[$JSON.$I$1];[.J178];[$JSON.$J$1];[.$L178];[$JSON.$K$1];[.$O178];[$JSON.$L$1];[.$N178];[$JSON.$M$1];[.$R178];[$JSON.$N$1];[.$T178];[$JSON.$O$1];[.$W178];[$JSON.$P$1];[.$A178];[$JSON.$Q$1];[.$B178];[$JSON.$R$1])" office:value-type="string" office:string-value="{&quot;id&quot;:&quot;2-45&quot;,&quot;name&quot;:&quot;新井白石&quot;,&quot;kana&quot;:&quot;あらいはくせき&quot;,&quot;traitText&quot;:null,&quot;ruleText&quot;:&quot;ハイケイが相手の戦場に置かれる際、そのハイケイは寝ている状態で戦場に置かれる。¶相手の戦場の寝ているハイケイは、能力すべてを失う。この能力は、能力によって失われない。&quot;,&quot;legacyText&quot;:&quot;1ドローする&quot;,&quot;imageUrl&quot;:&quot;https://one-draw.jp/ijinden/cardlist/002/card/02_045.png&quot;,&quot;expansion&quot;:25,&quot;rarity&quot;:2,&quot;type&quot;:1,&quot;level&quot;:2,&quot;color&quot;:8,&quot;term&quot;:0,&quot;trait&quot;:0,&quot;legacy&quot;:4,&quot;orderTable&quot;:177,&quot;orderDeck&quot;:55}," calcext:value-type="string">
            <text:p>{"id":"2-45","name":"新井白石","kana":"あらいはくせき","traitText":null,"ruleText":"ハイケイが相手の戦場に置かれる際、そのハイケイは寝ている状態で戦場に置かれる。¶相手の戦場の寝ているハイケイは、能力すべてを失う。この能力は、能力によって失われない。","legacyText":"1ドローする","imageUrl":"https://one-draw.jp/ijinden/cardlist/002/card/02_045.png","expansion":25,"rarity":2,"type":1,"level":2,"color":8,"term":0,"trait":0,"legacy":4,"orderTable":177,"orderDeck":55},</text:p>
          </table:table-cell>
          <table:table-cell table:number-columns-repeated="16347"/>
        </table:table-row>
        <table:table-row table:style-name="ro2">
          <table:table-cell office:value-type="float" office:value="178" calcext:value-type="float">
            <text:p>178</text:p>
          </table:table-cell>
          <table:table-cell office:value-type="float" office:value="136" calcext:value-type="float">
            <text:p>136</text:p>
          </table:table-cell>
          <table:table-cell office:value-type="string" calcext:value-type="string">
            <text:p>2-46</text:p>
          </table:table-cell>
          <table:table-cell office:value-type="float" office:value="46" calcext:value-type="float">
            <text:p>46</text:p>
          </table:table-cell>
          <table:table-cell office:value-type="string" calcext:value-type="string">
            <text:p>孫夫人</text:p>
          </table:table-cell>
          <table:table-cell office:value-type="string" calcext:value-type="string">
            <text:p>そんふじん</text:p>
          </table:table-cell>
          <table:table-cell office:value-type="string" calcext:value-type="string">
            <text:p>第２弾ブースターパック</text:p>
          </table:table-cell>
          <table:table-cell table:formula="of:=VLOOKUP([.G179];[$収録番号.$A$1:$収録番号.$B$9];2;0)" office:value-type="float" office:value="25" calcext:value-type="float">
            <text:p>25</text:p>
          </table:table-cell>
          <table:table-cell office:value-type="string" calcext:value-type="string">
            <text:p>N</text:p>
          </table:table-cell>
          <table:table-cell table:formula="of:=VLOOKUP([.I179];[$レアリティ番号.$A$1:$レアリティ番号.$B$4];2;0)" office:value-type="float" office:value="1" calcext:value-type="float">
            <text:p>1</text:p>
          </table:table-cell>
          <table:table-cell office:value-type="string" calcext:value-type="string">
            <text:p>イジン</text:p>
          </table:table-cell>
          <table:table-cell table:formula="of:=VLOOKUP([.K179];[$種類番号.$A$1:$種類番号.$B$4];2;0)" office:value-type="float" office:value="1" calcext:value-type="float">
            <text:p>1</text:p>
          </table:table-cell>
          <table:table-cell office:value-type="string" calcext:value-type="string">
            <text:p>黄</text:p>
          </table:table-cell>
          <table:table-cell table:formula="of:=VLOOKUP([.M179];[$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7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79];[$特性番号.$A$1:$特性番号.$B$8];2;0);0)" office:value-type="float" office:value="0" calcext:value-type="float">
            <text:p>0</text:p>
          </table:table-cell>
          <table:table-cell office:value-type="string" calcext:value-type="string">
            <text:p>戦場に置かれたとき、自分の手札の「装備」を持つカード1つを見せて発動できる。イジン召喚権+1するか、このターンの間「即応」を得る。¶これが戦場にいる間、装備しているイジンは、装備していないイジンにブロックされない。</text:p>
          </table:table-cell>
          <table:table-cell table:style-name="ce8" office:value-type="string" calcext:value-type="string">
            <text:p>1ドローする</text:p>
          </table:table-cell>
          <table:table-cell table:formula="of:=IFERROR(VLOOKUP([.$V179];[$遺業能力番号.$A$1:$遺業能力番号.$B$9];2;0);0)" office:value-type="float" office:value="4" calcext:value-type="float">
            <text:p>4</text:p>
          </table:table-cell>
          <table:table-cell office:value-type="string" calcext:value-type="string">
            <text:p>https://one-draw.jp/ijinden/cardlist/002/card/02_046.png</text:p>
          </table:table-cell>
          <table:table-cell table:formula="of:=CONCATENATE([$JSON.$A$1];[.$C179];[$JSON.$B$1];[.$E179];[$JSON.$C$1];[.$F179];[$JSON.$D$1];IF(ISNA([.$S179]);&quot;null&quot;;&quot;&quot;&quot;&quot;&amp;[.$S179]&amp;&quot;&quot;&quot;&quot;);[$JSON.$E$1];[.$U179];[$JSON.$F$1];IF(ISNA([.$V179]);&quot;null&quot;;&quot;&quot;&quot;&quot;&amp;[.$V179]&amp;&quot;&quot;&quot;&quot;);[$JSON.$G$1];[.$X179];[$JSON.$H$1];[.$H179];[$JSON.$I$1];[.J179];[$JSON.$J$1];[.$L179];[$JSON.$K$1];[.$O179];[$JSON.$L$1];[.$N179];[$JSON.$M$1];[.$R179];[$JSON.$N$1];[.$T179];[$JSON.$O$1];[.$W179];[$JSON.$P$1];[.$A179];[$JSON.$Q$1];[.$B179];[$JSON.$R$1])" office:value-type="string" office:string-value="{&quot;id&quot;:&quot;2-46&quot;,&quot;name&quot;:&quot;孫夫人&quot;,&quot;kana&quot;:&quot;そんふじん&quot;,&quot;traitText&quot;:null,&quot;ruleText&quot;:&quot;戦場に置かれたとき、自分の手札の「装備」を持つカード1つを見せて発動できる。イジン召喚権+1するか、このターンの間「即応」を得る。¶これが戦場にいる間、装備しているイジンは、装備していないイジンにブロックされない。&quot;,&quot;legacyText&quot;:&quot;1ドローする&quot;,&quot;imageUrl&quot;:&quot;https://one-draw.jp/ijinden/cardlist/002/card/02_046.png&quot;,&quot;expansion&quot;:25,&quot;rarity&quot;:1,&quot;type&quot;:1,&quot;level&quot;:4,&quot;color&quot;:8,&quot;term&quot;:0,&quot;trait&quot;:0,&quot;legacy&quot;:4,&quot;orderTable&quot;:178,&quot;orderDeck&quot;:136}," calcext:value-type="string">
            <text:p>{"id":"2-46","name":"孫夫人","kana":"そんふじん","traitText":null,"ruleText":"戦場に置かれたとき、自分の手札の「装備」を持つカード1つを見せて発動できる。イジン召喚権+1するか、このターンの間「即応」を得る。¶これが戦場にいる間、装備しているイジンは、装備していないイジンにブロックされない。","legacyText":"1ドローする","imageUrl":"https://one-draw.jp/ijinden/cardlist/002/card/02_046.png","expansion":25,"rarity":1,"type":1,"level":4,"color":8,"term":0,"trait":0,"legacy":4,"orderTable":178,"orderDeck":136},</text:p>
          </table:table-cell>
          <table:table-cell table:number-columns-repeated="16347"/>
        </table:table-row>
        <table:table-row table:style-name="ro2">
          <table:table-cell office:value-type="float" office:value="179" calcext:value-type="float">
            <text:p>179</text:p>
          </table:table-cell>
          <table:table-cell office:value-type="float" office:value="97" calcext:value-type="float">
            <text:p>97</text:p>
          </table:table-cell>
          <table:table-cell office:value-type="string" calcext:value-type="string">
            <text:p>2-47</text:p>
          </table:table-cell>
          <table:table-cell office:value-type="float" office:value="47" calcext:value-type="float">
            <text:p>47</text:p>
          </table:table-cell>
          <table:table-cell office:value-type="string" calcext:value-type="string">
            <text:p>法然</text:p>
          </table:table-cell>
          <table:table-cell office:value-type="string" calcext:value-type="string">
            <text:p>ほうねん</text:p>
          </table:table-cell>
          <table:table-cell office:value-type="string" calcext:value-type="string">
            <text:p>第２弾ブースターパック</text:p>
          </table:table-cell>
          <table:table-cell table:formula="of:=VLOOKUP([.G180];[$収録番号.$A$1:$収録番号.$B$9];2;0)" office:value-type="float" office:value="25" calcext:value-type="float">
            <text:p>25</text:p>
          </table:table-cell>
          <table:table-cell office:value-type="string" calcext:value-type="string">
            <text:p>N</text:p>
          </table:table-cell>
          <table:table-cell table:formula="of:=VLOOKUP([.I180];[$レアリティ番号.$A$1:$レアリティ番号.$B$4];2;0)" office:value-type="float" office:value="1" calcext:value-type="float">
            <text:p>1</text:p>
          </table:table-cell>
          <table:table-cell office:value-type="string" calcext:value-type="string">
            <text:p>イジン</text:p>
          </table:table-cell>
          <table:table-cell table:formula="of:=VLOOKUP([.K180];[$種類番号.$A$1:$種類番号.$B$4];2;0)" office:value-type="float" office:value="1" calcext:value-type="float">
            <text:p>1</text:p>
          </table:table-cell>
          <table:table-cell office:value-type="string" calcext:value-type="string">
            <text:p>黄</text:p>
          </table:table-cell>
          <table:table-cell table:formula="of:=VLOOKUP([.M180];[$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8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80];[$特性番号.$A$1:$特性番号.$B$8];2;0);0)" office:value-type="float" office:value="0" calcext:value-type="float">
            <text:p>0</text:p>
          </table:table-cell>
          <table:table-cell office:value-type="string" calcext:value-type="string">
            <text:p>カードが自分の墓地にない間「ウォッチャー」を得る。¶自分のエンドフェイズが開始したとき、墓地のマリョクでないカード1つを指定して発動できる。そのカードを山札の下に戻す。</text:p>
          </table:table-cell>
          <table:table-cell table:style-name="ce8" office:value-type="string" calcext:value-type="string">
            <text:p>山札の上か下に戻す</text:p>
          </table:table-cell>
          <table:table-cell table:formula="of:=IFERROR(VLOOKUP([.$V180];[$遺業能力番号.$A$1:$遺業能力番号.$B$9];2;0);0)" office:value-type="float" office:value="7" calcext:value-type="float">
            <text:p>7</text:p>
          </table:table-cell>
          <table:table-cell office:value-type="string" calcext:value-type="string">
            <text:p>https://one-draw.jp/ijinden/cardlist/002/card/02_047.png</text:p>
          </table:table-cell>
          <table:table-cell table:formula="of:=CONCATENATE([$JSON.$A$1];[.$C180];[$JSON.$B$1];[.$E180];[$JSON.$C$1];[.$F180];[$JSON.$D$1];IF(ISNA([.$S180]);&quot;null&quot;;&quot;&quot;&quot;&quot;&amp;[.$S180]&amp;&quot;&quot;&quot;&quot;);[$JSON.$E$1];[.$U180];[$JSON.$F$1];IF(ISNA([.$V180]);&quot;null&quot;;&quot;&quot;&quot;&quot;&amp;[.$V180]&amp;&quot;&quot;&quot;&quot;);[$JSON.$G$1];[.$X180];[$JSON.$H$1];[.$H180];[$JSON.$I$1];[.J180];[$JSON.$J$1];[.$L180];[$JSON.$K$1];[.$O180];[$JSON.$L$1];[.$N180];[$JSON.$M$1];[.$R180];[$JSON.$N$1];[.$T180];[$JSON.$O$1];[.$W180];[$JSON.$P$1];[.$A180];[$JSON.$Q$1];[.$B180];[$JSON.$R$1])" office:value-type="string" office:string-value="{&quot;id&quot;:&quot;2-47&quot;,&quot;name&quot;:&quot;法然&quot;,&quot;kana&quot;:&quot;ほうねん&quot;,&quot;traitText&quot;:null,&quot;ruleText&quot;:&quot;カードが自分の墓地にない間「ウォッチャー」を得る。¶自分のエンドフェイズが開始したとき、墓地のマリョクでないカード1つを指定して発動できる。そのカードを山札の下に戻す。&quot;,&quot;legacyText&quot;:&quot;山札の上か下に戻す&quot;,&quot;imageUrl&quot;:&quot;https://one-draw.jp/ijinden/cardlist/002/card/02_047.png&quot;,&quot;expansion&quot;:25,&quot;rarity&quot;:1,&quot;type&quot;:1,&quot;level&quot;:3,&quot;color&quot;:8,&quot;term&quot;:0,&quot;trait&quot;:0,&quot;legacy&quot;:7,&quot;orderTable&quot;:179,&quot;orderDeck&quot;:97}," calcext:value-type="string">
            <text:p>{"id":"2-47","name":"法然","kana":"ほうねん","traitText":null,"ruleText":"カードが自分の墓地にない間「ウォッチャー」を得る。¶自分のエンドフェイズが開始したとき、墓地のマリョクでないカード1つを指定して発動できる。そのカードを山札の下に戻す。","legacyText":"山札の上か下に戻す","imageUrl":"https://one-draw.jp/ijinden/cardlist/002/card/02_047.png","expansion":25,"rarity":1,"type":1,"level":3,"color":8,"term":0,"trait":0,"legacy":7,"orderTable":179,"orderDeck":97},</text:p>
          </table:table-cell>
          <table:table-cell table:number-columns-repeated="16347"/>
        </table:table-row>
        <table:table-row table:style-name="ro2">
          <table:table-cell office:value-type="float" office:value="180" calcext:value-type="float">
            <text:p>180</text:p>
          </table:table-cell>
          <table:table-cell office:value-type="float" office:value="173" calcext:value-type="float">
            <text:p>173</text:p>
          </table:table-cell>
          <table:table-cell office:value-type="string" calcext:value-type="string">
            <text:p>2-48</text:p>
          </table:table-cell>
          <table:table-cell office:value-type="float" office:value="48" calcext:value-type="float">
            <text:p>48</text:p>
          </table:table-cell>
          <table:table-cell office:value-type="string" calcext:value-type="string">
            <text:p>一遍</text:p>
          </table:table-cell>
          <table:table-cell office:value-type="string" calcext:value-type="string">
            <text:p>いっぺん</text:p>
          </table:table-cell>
          <table:table-cell office:value-type="string" calcext:value-type="string">
            <text:p>第２弾ブースターパック</text:p>
          </table:table-cell>
          <table:table-cell table:formula="of:=VLOOKUP([.G181];[$収録番号.$A$1:$収録番号.$B$9];2;0)" office:value-type="float" office:value="25" calcext:value-type="float">
            <text:p>25</text:p>
          </table:table-cell>
          <table:table-cell office:value-type="string" calcext:value-type="string">
            <text:p>N</text:p>
          </table:table-cell>
          <table:table-cell table:formula="of:=VLOOKUP([.I181];[$レアリティ番号.$A$1:$レアリティ番号.$B$4];2;0)" office:value-type="float" office:value="1" calcext:value-type="float">
            <text:p>1</text:p>
          </table:table-cell>
          <table:table-cell office:value-type="string" calcext:value-type="string">
            <text:p>イジン</text:p>
          </table:table-cell>
          <table:table-cell table:formula="of:=VLOOKUP([.K181];[$種類番号.$A$1:$種類番号.$B$4];2;0)" office:value-type="float" office:value="1" calcext:value-type="float">
            <text:p>1</text:p>
          </table:table-cell>
          <table:table-cell office:value-type="string" calcext:value-type="string">
            <text:p>黄</text:p>
          </table:table-cell>
          <table:table-cell table:formula="of:=VLOOKUP([.M181];[$色番号.$A$1:$色番号.$B$10];2;0)" office:value-type="float" office:value="8" calcext:value-type="float">
            <text:p>8</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8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81];[$特性番号.$A$1:$特性番号.$B$8];2;0);0)" office:value-type="float" office:value="0" calcext:value-type="float">
            <text:p>0</text:p>
          </table:table-cell>
          <table:table-cell office:value-type="string" calcext:value-type="string">
            <text:p>カードが自分の墓地にない間「ウォッチャー」を得る。¶カードが相手の墓地にない間「トリプルプレッシャー」を得る。</text:p>
          </table:table-cell>
          <table:table-cell table:style-name="ce8" office:value-type="string" calcext:value-type="string">
            <text:p>山札の上か下に戻す</text:p>
          </table:table-cell>
          <table:table-cell table:formula="of:=IFERROR(VLOOKUP([.$V181];[$遺業能力番号.$A$1:$遺業能力番号.$B$9];2;0);0)" office:value-type="float" office:value="7" calcext:value-type="float">
            <text:p>7</text:p>
          </table:table-cell>
          <table:table-cell office:value-type="string" calcext:value-type="string">
            <text:p>https://one-draw.jp/ijinden/cardlist/002/card/02_048.png</text:p>
          </table:table-cell>
          <table:table-cell table:formula="of:=CONCATENATE([$JSON.$A$1];[.$C181];[$JSON.$B$1];[.$E181];[$JSON.$C$1];[.$F181];[$JSON.$D$1];IF(ISNA([.$S181]);&quot;null&quot;;&quot;&quot;&quot;&quot;&amp;[.$S181]&amp;&quot;&quot;&quot;&quot;);[$JSON.$E$1];[.$U181];[$JSON.$F$1];IF(ISNA([.$V181]);&quot;null&quot;;&quot;&quot;&quot;&quot;&amp;[.$V181]&amp;&quot;&quot;&quot;&quot;);[$JSON.$G$1];[.$X181];[$JSON.$H$1];[.$H181];[$JSON.$I$1];[.J181];[$JSON.$J$1];[.$L181];[$JSON.$K$1];[.$O181];[$JSON.$L$1];[.$N181];[$JSON.$M$1];[.$R181];[$JSON.$N$1];[.$T181];[$JSON.$O$1];[.$W181];[$JSON.$P$1];[.$A181];[$JSON.$Q$1];[.$B181];[$JSON.$R$1])" office:value-type="string" office:string-value="{&quot;id&quot;:&quot;2-48&quot;,&quot;name&quot;:&quot;一遍&quot;,&quot;kana&quot;:&quot;いっぺん&quot;,&quot;traitText&quot;:null,&quot;ruleText&quot;:&quot;カードが自分の墓地にない間「ウォッチャー」を得る。¶カードが相手の墓地にない間「トリプルプレッシャー」を得る。&quot;,&quot;legacyText&quot;:&quot;山札の上か下に戻す&quot;,&quot;imageUrl&quot;:&quot;https://one-draw.jp/ijinden/cardlist/002/card/02_048.png&quot;,&quot;expansion&quot;:25,&quot;rarity&quot;:1,&quot;type&quot;:1,&quot;level&quot;:5,&quot;color&quot;:8,&quot;term&quot;:0,&quot;trait&quot;:0,&quot;legacy&quot;:7,&quot;orderTable&quot;:180,&quot;orderDeck&quot;:173}," calcext:value-type="string">
            <text:p>{"id":"2-48","name":"一遍","kana":"いっぺん","traitText":null,"ruleText":"カードが自分の墓地にない間「ウォッチャー」を得る。¶カードが相手の墓地にない間「トリプルプレッシャー」を得る。","legacyText":"山札の上か下に戻す","imageUrl":"https://one-draw.jp/ijinden/cardlist/002/card/02_048.png","expansion":25,"rarity":1,"type":1,"level":5,"color":8,"term":0,"trait":0,"legacy":7,"orderTable":180,"orderDeck":173},</text:p>
          </table:table-cell>
          <table:table-cell table:number-columns-repeated="16347"/>
        </table:table-row>
        <table:table-row table:style-name="ro2">
          <table:table-cell office:value-type="float" office:value="181" calcext:value-type="float">
            <text:p>181</text:p>
          </table:table-cell>
          <table:table-cell office:value-type="float" office:value="240" calcext:value-type="float">
            <text:p>240</text:p>
          </table:table-cell>
          <table:table-cell office:value-type="string" calcext:value-type="string">
            <text:p>2-49</text:p>
          </table:table-cell>
          <table:table-cell office:value-type="float" office:value="49" calcext:value-type="float">
            <text:p>49</text:p>
          </table:table-cell>
          <table:table-cell office:value-type="string" calcext:value-type="string">
            <text:p>籠城戦</text:p>
          </table:table-cell>
          <table:table-cell office:value-type="string" calcext:value-type="string">
            <text:p>ろうじょうせん</text:p>
          </table:table-cell>
          <table:table-cell office:value-type="string" calcext:value-type="string">
            <text:p>第２弾ブースターパック</text:p>
          </table:table-cell>
          <table:table-cell table:formula="of:=VLOOKUP([.G182];[$収録番号.$A$1:$収録番号.$B$9];2;0)" office:value-type="float" office:value="25" calcext:value-type="float">
            <text:p>25</text:p>
          </table:table-cell>
          <table:table-cell office:value-type="string" calcext:value-type="string">
            <text:p>N</text:p>
          </table:table-cell>
          <table:table-cell table:formula="of:=VLOOKUP([.I182];[$レアリティ番号.$A$1:$レアリティ番号.$B$4];2;0)" office:value-type="float" office:value="1" calcext:value-type="float">
            <text:p>1</text:p>
          </table:table-cell>
          <table:table-cell office:value-type="string" calcext:value-type="string">
            <text:p>ハイケイ</text:p>
          </table:table-cell>
          <table:table-cell table:formula="of:=VLOOKUP([.K182];[$種類番号.$A$1:$種類番号.$B$4];2;0)" office:value-type="float" office:value="2" calcext:value-type="float">
            <text:p>2</text:p>
          </table:table-cell>
          <table:table-cell office:value-type="string" calcext:value-type="string">
            <text:p>赤</text:p>
          </table:table-cell>
          <table:table-cell table:formula="of:=VLOOKUP([.M182];[$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決起</text:p>
          </table:table-cell>
          <table:table-cell table:formula="of:=IFERROR(VLOOKUP([.$Q182];[$能力語番号.$A$1:$能力語番号.$B$10];2;0);0)" office:value-type="float" office:value="4" calcext:value-type="float">
            <text:p>4</text:p>
          </table:table-cell>
          <table:table-cell table:formula="of:=NA()" office:value-type="string" office:string-value="" calcext:value-type="error">
            <text:p>#N/A</text:p>
          </table:table-cell>
          <table:table-cell table:formula="of:=IFERROR(VLOOKUP([.$S182];[$特性番号.$A$1:$特性番号.$B$8];2;0);0)" office:value-type="float" office:value="0" calcext:value-type="float">
            <text:p>0</text:p>
          </table:table-cell>
          <table:table-cell office:value-type="string" calcext:value-type="string">
            <text:p>自分の墓地にある「反魂」は、ガーディアンを山札の下に戻す代わりに、これを山札の下に戻しても発動する。¶決起 - マリョク配置によってカードが自分の魔力ゾーンに置かれたとき、自分の魔力ゾーンのマリョクが4つ以上なら発動できる。1ドローする。</text:p>
          </table:table-cell>
          <table:table-cell table:style-name="ce8" office:value-type="string" calcext:value-type="string">
            <text:p>魔力化</text:p>
          </table:table-cell>
          <table:table-cell table:formula="of:=IFERROR(VLOOKUP([.$V182];[$遺業能力番号.$A$1:$遺業能力番号.$B$9];2;0);0)" office:value-type="float" office:value="1" calcext:value-type="float">
            <text:p>1</text:p>
          </table:table-cell>
          <table:table-cell office:value-type="string" calcext:value-type="string">
            <text:p>https://one-draw.jp/ijinden/cardlist/002/card/02_049.png</text:p>
          </table:table-cell>
          <table:table-cell table:formula="of:=CONCATENATE([$JSON.$A$1];[.$C182];[$JSON.$B$1];[.$E182];[$JSON.$C$1];[.$F182];[$JSON.$D$1];IF(ISNA([.$S182]);&quot;null&quot;;&quot;&quot;&quot;&quot;&amp;[.$S182]&amp;&quot;&quot;&quot;&quot;);[$JSON.$E$1];[.$U182];[$JSON.$F$1];IF(ISNA([.$V182]);&quot;null&quot;;&quot;&quot;&quot;&quot;&amp;[.$V182]&amp;&quot;&quot;&quot;&quot;);[$JSON.$G$1];[.$X182];[$JSON.$H$1];[.$H182];[$JSON.$I$1];[.J182];[$JSON.$J$1];[.$L182];[$JSON.$K$1];[.$O182];[$JSON.$L$1];[.$N182];[$JSON.$M$1];[.$R182];[$JSON.$N$1];[.$T182];[$JSON.$O$1];[.$W182];[$JSON.$P$1];[.$A182];[$JSON.$Q$1];[.$B182];[$JSON.$R$1])" office:value-type="string" office:string-value="{&quot;id&quot;:&quot;2-49&quot;,&quot;name&quot;:&quot;籠城戦&quot;,&quot;kana&quot;:&quot;ろうじょうせん&quot;,&quot;traitText&quot;:null,&quot;ruleText&quot;:&quot;自分の墓地にある「反魂」は、ガーディアンを山札の下に戻す代わりに、これを山札の下に戻しても発動する。¶決起 - マリョク配置によってカードが自分の魔力ゾーンに置かれたとき、自分の魔力ゾーンのマリョクが4つ以上なら発動できる。1ドローする。&quot;,&quot;legacyText&quot;:&quot;魔力化&quot;,&quot;imageUrl&quot;:&quot;https://one-draw.jp/ijinden/cardlist/002/card/02_049.png&quot;,&quot;expansion&quot;:25,&quot;rarity&quot;:1,&quot;type&quot;:2,&quot;level&quot;:2,&quot;color&quot;:1,&quot;term&quot;:4,&quot;trait&quot;:0,&quot;legacy&quot;:1,&quot;orderTable&quot;:181,&quot;orderDeck&quot;:240}," calcext:value-type="string">
            <text:p>{"id":"2-49","name":"籠城戦","kana":"ろうじょうせん","traitText":null,"ruleText":"自分の墓地にある「反魂」は、ガーディアンを山札の下に戻す代わりに、これを山札の下に戻しても発動する。¶決起 - マリョク配置によってカードが自分の魔力ゾーンに置かれたとき、自分の魔力ゾーンのマリョクが4つ以上なら発動できる。1ドローする。","legacyText":"魔力化","imageUrl":"https://one-draw.jp/ijinden/cardlist/002/card/02_049.png","expansion":25,"rarity":1,"type":2,"level":2,"color":1,"term":4,"trait":0,"legacy":1,"orderTable":181,"orderDeck":240},</text:p>
          </table:table-cell>
          <table:table-cell table:number-columns-repeated="16347"/>
        </table:table-row>
        <table:table-row table:style-name="ro2">
          <table:table-cell office:value-type="float" office:value="182" calcext:value-type="float">
            <text:p>182</text:p>
          </table:table-cell>
          <table:table-cell office:value-type="float" office:value="266" calcext:value-type="float">
            <text:p>266</text:p>
          </table:table-cell>
          <table:table-cell office:value-type="string" calcext:value-type="string">
            <text:p>2-50</text:p>
          </table:table-cell>
          <table:table-cell office:value-type="float" office:value="50" calcext:value-type="float">
            <text:p>50</text:p>
          </table:table-cell>
          <table:table-cell office:value-type="string" calcext:value-type="string">
            <text:p>安宅船</text:p>
          </table:table-cell>
          <table:table-cell office:value-type="string" calcext:value-type="string">
            <text:p>あたけぶね</text:p>
          </table:table-cell>
          <table:table-cell office:value-type="string" calcext:value-type="string">
            <text:p>第２弾ブースターパック</text:p>
          </table:table-cell>
          <table:table-cell table:formula="of:=VLOOKUP([.G183];[$収録番号.$A$1:$収録番号.$B$9];2;0)" office:value-type="float" office:value="25" calcext:value-type="float">
            <text:p>25</text:p>
          </table:table-cell>
          <table:table-cell office:value-type="string" calcext:value-type="string">
            <text:p>N</text:p>
          </table:table-cell>
          <table:table-cell table:formula="of:=VLOOKUP([.I183];[$レアリティ番号.$A$1:$レアリティ番号.$B$4];2;0)" office:value-type="float" office:value="1" calcext:value-type="float">
            <text:p>1</text:p>
          </table:table-cell>
          <table:table-cell office:value-type="string" calcext:value-type="string">
            <text:p>ハイケイ</text:p>
          </table:table-cell>
          <table:table-cell table:formula="of:=VLOOKUP([.K183];[$種類番号.$A$1:$種類番号.$B$4];2;0)" office:value-type="float" office:value="2" calcext:value-type="float">
            <text:p>2</text:p>
          </table:table-cell>
          <table:table-cell office:value-type="string" calcext:value-type="string">
            <text:p>赤</text:p>
          </table:table-cell>
          <table:table-cell table:formula="of:=VLOOKUP([.M183];[$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8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83];[$特性番号.$A$1:$特性番号.$B$8];2;0);0)" office:value-type="float" office:value="0" calcext:value-type="float">
            <text:p>0</text:p>
          </table:table-cell>
          <table:table-cell office:value-type="string" calcext:value-type="string">
            <text:p>自分のメインフェイズが開始したとき、自分の戦場のイジンをすきなだけ寝かせる。寝かせた1体につきイジン召喚権+1する。¶イジン召喚によって赤か黄のイジンが自分の戦場に置かれる際、そのイジンに装備させてもよい。¶装備 : バトルに際し、これをアタッカーに選ぶ限り、寝ているイジンもアタッカーに選べる。</text:p>
          </table:table-cell>
          <table:table-cell table:style-name="ce8" table:formula="of:=NA()" office:value-type="string" office:string-value="" calcext:value-type="error">
            <text:p>#N/A</text:p>
          </table:table-cell>
          <table:table-cell table:formula="of:=IFERROR(VLOOKUP([.$V183];[$遺業能力番号.$A$1:$遺業能力番号.$B$9];2;0);0)" office:value-type="float" office:value="0" calcext:value-type="float">
            <text:p>0</text:p>
          </table:table-cell>
          <table:table-cell office:value-type="string" calcext:value-type="string">
            <text:p>https://one-draw.jp/ijinden/cardlist/002/card/02_050.png</text:p>
          </table:table-cell>
          <table:table-cell table:formula="of:=CONCATENATE([$JSON.$A$1];[.$C183];[$JSON.$B$1];[.$E183];[$JSON.$C$1];[.$F183];[$JSON.$D$1];IF(ISNA([.$S183]);&quot;null&quot;;&quot;&quot;&quot;&quot;&amp;[.$S183]&amp;&quot;&quot;&quot;&quot;);[$JSON.$E$1];[.$U183];[$JSON.$F$1];IF(ISNA([.$V183]);&quot;null&quot;;&quot;&quot;&quot;&quot;&amp;[.$V183]&amp;&quot;&quot;&quot;&quot;);[$JSON.$G$1];[.$X183];[$JSON.$H$1];[.$H183];[$JSON.$I$1];[.J183];[$JSON.$J$1];[.$L183];[$JSON.$K$1];[.$O183];[$JSON.$L$1];[.$N183];[$JSON.$M$1];[.$R183];[$JSON.$N$1];[.$T183];[$JSON.$O$1];[.$W183];[$JSON.$P$1];[.$A183];[$JSON.$Q$1];[.$B183];[$JSON.$R$1])" office:value-type="string" office:string-value="{&quot;id&quot;:&quot;2-50&quot;,&quot;name&quot;:&quot;安宅船&quot;,&quot;kana&quot;:&quot;あたけぶね&quot;,&quot;traitText&quot;:null,&quot;ruleText&quot;:&quot;自分のメインフェイズが開始したとき、自分の戦場のイジンをすきなだけ寝かせる。寝かせた1体につきイジン召喚権+1する。¶イジン召喚によって赤か黄のイジンが自分の戦場に置かれる際、そのイジンに装備させてもよい。¶装備 : バトルに際し、これをアタッカーに選ぶ限り、寝ているイジンもアタッカーに選べる。&quot;,&quot;legacyText&quot;:null,&quot;imageUrl&quot;:&quot;https://one-draw.jp/ijinden/cardlist/002/card/02_050.png&quot;,&quot;expansion&quot;:25,&quot;rarity&quot;:1,&quot;type&quot;:2,&quot;level&quot;:5,&quot;color&quot;:1,&quot;term&quot;:0,&quot;trait&quot;:0,&quot;legacy&quot;:0,&quot;orderTable&quot;:182,&quot;orderDeck&quot;:266}," calcext:value-type="string">
            <text:p>{"id":"2-50","name":"安宅船","kana":"あたけぶね","traitText":null,"ruleText":"自分のメインフェイズが開始したとき、自分の戦場のイジンをすきなだけ寝かせる。寝かせた1体につきイジン召喚権+1する。¶イジン召喚によって赤か黄のイジンが自分の戦場に置かれる際、そのイジンに装備させてもよい。¶装備 : バトルに際し、これをアタッカーに選ぶ限り、寝ているイジンもアタッカーに選べる。","legacyText":null,"imageUrl":"https://one-draw.jp/ijinden/cardlist/002/card/02_050.png","expansion":25,"rarity":1,"type":2,"level":5,"color":1,"term":0,"trait":0,"legacy":0,"orderTable":182,"orderDeck":266},</text:p>
          </table:table-cell>
          <table:table-cell table:number-columns-repeated="16347"/>
        </table:table-row>
        <table:table-row table:style-name="ro2">
          <table:table-cell office:value-type="float" office:value="183" calcext:value-type="float">
            <text:p>183</text:p>
          </table:table-cell>
          <table:table-cell office:value-type="float" office:value="261" calcext:value-type="float">
            <text:p>261</text:p>
          </table:table-cell>
          <table:table-cell office:value-type="string" calcext:value-type="string">
            <text:p>2-51</text:p>
          </table:table-cell>
          <table:table-cell office:value-type="float" office:value="51" calcext:value-type="float">
            <text:p>51</text:p>
          </table:table-cell>
          <table:table-cell office:value-type="string" calcext:value-type="string">
            <text:p>リヴァイアサン</text:p>
          </table:table-cell>
          <table:table-cell office:value-type="string" calcext:value-type="string">
            <text:p>りゔぁいあさん</text:p>
          </table:table-cell>
          <table:table-cell office:value-type="string" calcext:value-type="string">
            <text:p>第２弾ブースターパック</text:p>
          </table:table-cell>
          <table:table-cell table:formula="of:=VLOOKUP([.G184];[$収録番号.$A$1:$収録番号.$B$9];2;0)" office:value-type="float" office:value="25" calcext:value-type="float">
            <text:p>25</text:p>
          </table:table-cell>
          <table:table-cell office:value-type="string" calcext:value-type="string">
            <text:p>N</text:p>
          </table:table-cell>
          <table:table-cell table:formula="of:=VLOOKUP([.I184];[$レアリティ番号.$A$1:$レアリティ番号.$B$4];2;0)" office:value-type="float" office:value="1" calcext:value-type="float">
            <text:p>1</text:p>
          </table:table-cell>
          <table:table-cell office:value-type="string" calcext:value-type="string">
            <text:p>ハイケイ</text:p>
          </table:table-cell>
          <table:table-cell table:formula="of:=VLOOKUP([.K184];[$種類番号.$A$1:$種類番号.$B$4];2;0)" office:value-type="float" office:value="2" calcext:value-type="float">
            <text:p>2</text:p>
          </table:table-cell>
          <table:table-cell office:value-type="string" calcext:value-type="string">
            <text:p>青</text:p>
          </table:table-cell>
          <table:table-cell table:formula="of:=VLOOKUP([.M184];[$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84];[$能力語番号.$A$1:$能力語番号.$B$10];2;0);0)" office:value-type="float" office:value="0" calcext:value-type="float">
            <text:p>0</text:p>
          </table:table-cell>
          <table:table-cell office:value-type="string" calcext:value-type="string">
            <text:p>思想</text:p>
          </table:table-cell>
          <table:table-cell table:formula="of:=IFERROR(VLOOKUP([.$S184];[$特性番号.$A$1:$特性番号.$B$8];2;0);0)" office:value-type="float" office:value="8" calcext:value-type="float">
            <text:p>8</text:p>
          </table:table-cell>
          <table:table-cell office:value-type="string" calcext:value-type="string">
            <text:p>相手がアタックしたとき、自分の戦場のイジンをすきなだけ起こして、ガーディアンにする。</text:p>
          </table:table-cell>
          <table:table-cell table:style-name="ce8" office:value-type="string" calcext:value-type="string">
            <text:p>手札に戻す</text:p>
          </table:table-cell>
          <table:table-cell table:formula="of:=IFERROR(VLOOKUP([.$V184];[$遺業能力番号.$A$1:$遺業能力番号.$B$9];2;0);0)" office:value-type="float" office:value="5" calcext:value-type="float">
            <text:p>5</text:p>
          </table:table-cell>
          <table:table-cell office:value-type="string" calcext:value-type="string">
            <text:p>https://one-draw.jp/ijinden/cardlist/002/card/02_051.png</text:p>
          </table:table-cell>
          <table:table-cell table:formula="of:=CONCATENATE([$JSON.$A$1];[.$C184];[$JSON.$B$1];[.$E184];[$JSON.$C$1];[.$F184];[$JSON.$D$1];IF(ISNA([.$S184]);&quot;null&quot;;&quot;&quot;&quot;&quot;&amp;[.$S184]&amp;&quot;&quot;&quot;&quot;);[$JSON.$E$1];[.$U184];[$JSON.$F$1];IF(ISNA([.$V184]);&quot;null&quot;;&quot;&quot;&quot;&quot;&amp;[.$V184]&amp;&quot;&quot;&quot;&quot;);[$JSON.$G$1];[.$X184];[$JSON.$H$1];[.$H184];[$JSON.$I$1];[.J184];[$JSON.$J$1];[.$L184];[$JSON.$K$1];[.$O184];[$JSON.$L$1];[.$N184];[$JSON.$M$1];[.$R184];[$JSON.$N$1];[.$T184];[$JSON.$O$1];[.$W184];[$JSON.$P$1];[.$A184];[$JSON.$Q$1];[.$B184];[$JSON.$R$1])" office:value-type="string" office:string-value="{&quot;id&quot;:&quot;2-51&quot;,&quot;name&quot;:&quot;リヴァイアサン&quot;,&quot;kana&quot;:&quot;りゔぁいあさん&quot;,&quot;traitText&quot;:&quot;思想&quot;,&quot;ruleText&quot;:&quot;相手がアタックしたとき、自分の戦場のイジンをすきなだけ起こして、ガーディアンにする。&quot;,&quot;legacyText&quot;:&quot;手札に戻す&quot;,&quot;imageUrl&quot;:&quot;https://one-draw.jp/ijinden/cardlist/002/card/02_051.png&quot;,&quot;expansion&quot;:25,&quot;rarity&quot;:1,&quot;type&quot;:2,&quot;level&quot;:4,&quot;color&quot;:2,&quot;term&quot;:0,&quot;trait&quot;:8,&quot;legacy&quot;:5,&quot;orderTable&quot;:183,&quot;orderDeck&quot;:261}," calcext:value-type="string">
            <text:p>{"id":"2-51","name":"リヴァイアサン","kana":"りゔぁいあさん","traitText":"思想","ruleText":"相手がアタックしたとき、自分の戦場のイジンをすきなだけ起こして、ガーディアンにする。","legacyText":"手札に戻す","imageUrl":"https://one-draw.jp/ijinden/cardlist/002/card/02_051.png","expansion":25,"rarity":1,"type":2,"level":4,"color":2,"term":0,"trait":8,"legacy":5,"orderTable":183,"orderDeck":261},</text:p>
          </table:table-cell>
          <table:table-cell table:number-columns-repeated="16347"/>
        </table:table-row>
        <table:table-row table:style-name="ro2">
          <table:table-cell office:value-type="float" office:value="184" calcext:value-type="float">
            <text:p>184</text:p>
          </table:table-cell>
          <table:table-cell office:value-type="float" office:value="274" calcext:value-type="float">
            <text:p>274</text:p>
          </table:table-cell>
          <table:table-cell office:value-type="string" calcext:value-type="string">
            <text:p>2-52</text:p>
          </table:table-cell>
          <table:table-cell office:value-type="float" office:value="52" calcext:value-type="float">
            <text:p>52</text:p>
          </table:table-cell>
          <table:table-cell office:value-type="string" calcext:value-type="string">
            <text:p>ガレオン船</text:p>
          </table:table-cell>
          <table:table-cell office:value-type="string" calcext:value-type="string">
            <text:p>がれおんせん</text:p>
          </table:table-cell>
          <table:table-cell office:value-type="string" calcext:value-type="string">
            <text:p>第２弾ブースターパック</text:p>
          </table:table-cell>
          <table:table-cell table:formula="of:=VLOOKUP([.G185];[$収録番号.$A$1:$収録番号.$B$9];2;0)" office:value-type="float" office:value="25" calcext:value-type="float">
            <text:p>25</text:p>
          </table:table-cell>
          <table:table-cell office:value-type="string" calcext:value-type="string">
            <text:p>N</text:p>
          </table:table-cell>
          <table:table-cell table:formula="of:=VLOOKUP([.I185];[$レアリティ番号.$A$1:$レアリティ番号.$B$4];2;0)" office:value-type="float" office:value="1" calcext:value-type="float">
            <text:p>1</text:p>
          </table:table-cell>
          <table:table-cell office:value-type="string" calcext:value-type="string">
            <text:p>ハイケイ</text:p>
          </table:table-cell>
          <table:table-cell table:formula="of:=VLOOKUP([.K185];[$種類番号.$A$1:$種類番号.$B$4];2;0)" office:value-type="float" office:value="2" calcext:value-type="float">
            <text:p>2</text:p>
          </table:table-cell>
          <table:table-cell office:value-type="string" calcext:value-type="string">
            <text:p>青</text:p>
          </table:table-cell>
          <table:table-cell table:formula="of:=VLOOKUP([.M185];[$色番号.$A$1:$色番号.$B$10];2;0)" office:value-type="float" office:value="2" calcext:value-type="float">
            <text:p>2</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8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85];[$特性番号.$A$1:$特性番号.$B$8];2;0);0)" office:value-type="float" office:value="0" calcext:value-type="float">
            <text:p>0</text:p>
          </table:table-cell>
          <table:table-cell office:value-type="string" calcext:value-type="string">
            <text:p>「航海」を持つイジンが自分の戦場に置かれたとき、イジン召喚権+1する。¶イジン召喚によって青か黄のイジンが自分の戦場に置かれる際、そのイジンに装備させてもよい。¶装備 : 航海 - アタッカーになったとき、自分の墓地のレベル3以下のイジン1体を指定して発動できる。そのイジンを戦場に置く。</text:p>
          </table:table-cell>
          <table:table-cell table:style-name="ce8" table:formula="of:=NA()" office:value-type="string" office:string-value="" calcext:value-type="error">
            <text:p>#N/A</text:p>
          </table:table-cell>
          <table:table-cell table:formula="of:=IFERROR(VLOOKUP([.$V185];[$遺業能力番号.$A$1:$遺業能力番号.$B$9];2;0);0)" office:value-type="float" office:value="0" calcext:value-type="float">
            <text:p>0</text:p>
          </table:table-cell>
          <table:table-cell office:value-type="string" calcext:value-type="string">
            <text:p>https://one-draw.jp/ijinden/cardlist/002/card/02_052.png</text:p>
          </table:table-cell>
          <table:table-cell table:formula="of:=CONCATENATE([$JSON.$A$1];[.$C185];[$JSON.$B$1];[.$E185];[$JSON.$C$1];[.$F185];[$JSON.$D$1];IF(ISNA([.$S185]);&quot;null&quot;;&quot;&quot;&quot;&quot;&amp;[.$S185]&amp;&quot;&quot;&quot;&quot;);[$JSON.$E$1];[.$U185];[$JSON.$F$1];IF(ISNA([.$V185]);&quot;null&quot;;&quot;&quot;&quot;&quot;&amp;[.$V185]&amp;&quot;&quot;&quot;&quot;);[$JSON.$G$1];[.$X185];[$JSON.$H$1];[.$H185];[$JSON.$I$1];[.J185];[$JSON.$J$1];[.$L185];[$JSON.$K$1];[.$O185];[$JSON.$L$1];[.$N185];[$JSON.$M$1];[.$R185];[$JSON.$N$1];[.$T185];[$JSON.$O$1];[.$W185];[$JSON.$P$1];[.$A185];[$JSON.$Q$1];[.$B185];[$JSON.$R$1])" office:value-type="string" office:string-value="{&quot;id&quot;:&quot;2-52&quot;,&quot;name&quot;:&quot;ガレオン船&quot;,&quot;kana&quot;:&quot;がれおんせん&quot;,&quot;traitText&quot;:null,&quot;ruleText&quot;:&quot;「航海」を持つイジンが自分の戦場に置かれたとき、イジン召喚権+1する。¶イジン召喚によって青か黄のイジンが自分の戦場に置かれる際、そのイジンに装備させてもよい。¶装備 : 航海 - アタッカーになったとき、自分の墓地のレベル3以下のイジン1体を指定して発動できる。そのイジンを戦場に置く。&quot;,&quot;legacyText&quot;:null,&quot;imageUrl&quot;:&quot;https://one-draw.jp/ijinden/cardlist/002/card/02_052.png&quot;,&quot;expansion&quot;:25,&quot;rarity&quot;:1,&quot;type&quot;:2,&quot;level&quot;:6,&quot;color&quot;:2,&quot;term&quot;:0,&quot;trait&quot;:0,&quot;legacy&quot;:0,&quot;orderTable&quot;:184,&quot;orderDeck&quot;:274}," calcext:value-type="string">
            <text:p>{"id":"2-52","name":"ガレオン船","kana":"がれおんせん","traitText":null,"ruleText":"「航海」を持つイジンが自分の戦場に置かれたとき、イジン召喚権+1する。¶イジン召喚によって青か黄のイジンが自分の戦場に置かれる際、そのイジンに装備させてもよい。¶装備 : 航海 - アタッカーになったとき、自分の墓地のレベル3以下のイジン1体を指定して発動できる。そのイジンを戦場に置く。","legacyText":null,"imageUrl":"https://one-draw.jp/ijinden/cardlist/002/card/02_052.png","expansion":25,"rarity":1,"type":2,"level":6,"color":2,"term":0,"trait":0,"legacy":0,"orderTable":184,"orderDeck":274},</text:p>
          </table:table-cell>
          <table:table-cell table:number-columns-repeated="16347"/>
        </table:table-row>
        <table:table-row table:style-name="ro2">
          <table:table-cell office:value-type="float" office:value="185" calcext:value-type="float">
            <text:p>185</text:p>
          </table:table-cell>
          <table:table-cell office:value-type="float" office:value="244" calcext:value-type="float">
            <text:p>244</text:p>
          </table:table-cell>
          <table:table-cell office:value-type="string" calcext:value-type="string">
            <text:p>2-53</text:p>
          </table:table-cell>
          <table:table-cell office:value-type="float" office:value="53" calcext:value-type="float">
            <text:p>53</text:p>
          </table:table-cell>
          <table:table-cell office:value-type="string" calcext:value-type="string">
            <text:p>仁王</text:p>
          </table:table-cell>
          <table:table-cell office:value-type="string" calcext:value-type="string">
            <text:p>におう</text:p>
          </table:table-cell>
          <table:table-cell office:value-type="string" calcext:value-type="string">
            <text:p>第２弾ブースターパック</text:p>
          </table:table-cell>
          <table:table-cell table:formula="of:=VLOOKUP([.G186];[$収録番号.$A$1:$収録番号.$B$9];2;0)" office:value-type="float" office:value="25" calcext:value-type="float">
            <text:p>25</text:p>
          </table:table-cell>
          <table:table-cell office:value-type="string" calcext:value-type="string">
            <text:p>N</text:p>
          </table:table-cell>
          <table:table-cell table:formula="of:=VLOOKUP([.I186];[$レアリティ番号.$A$1:$レアリティ番号.$B$4];2;0)" office:value-type="float" office:value="1" calcext:value-type="float">
            <text:p>1</text:p>
          </table:table-cell>
          <table:table-cell office:value-type="string" calcext:value-type="string">
            <text:p>ハイケイ</text:p>
          </table:table-cell>
          <table:table-cell table:formula="of:=VLOOKUP([.K186];[$種類番号.$A$1:$種類番号.$B$4];2;0)" office:value-type="float" office:value="2" calcext:value-type="float">
            <text:p>2</text:p>
          </table:table-cell>
          <table:table-cell office:value-type="string" calcext:value-type="string">
            <text:p>緑</text:p>
          </table:table-cell>
          <table:table-cell table:formula="of:=VLOOKUP([.M186];[$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8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86];[$特性番号.$A$1:$特性番号.$B$8];2;0);0)" office:value-type="float" office:value="0" calcext:value-type="float">
            <text:p>0</text:p>
          </table:table-cell>
          <table:table-cell office:value-type="string" calcext:value-type="string">
            <text:p>能力によってこれを数える際、1つでなく2つと数える。¶イジンが自分の戦場に、ちょうど2体いる間、自分の戦場のイジンは「ウォッチャー」を得る。</text:p>
          </table:table-cell>
          <table:table-cell table:style-name="ce8" office:value-type="string" calcext:value-type="string">
            <text:p>魔力化</text:p>
          </table:table-cell>
          <table:table-cell table:formula="of:=IFERROR(VLOOKUP([.$V186];[$遺業能力番号.$A$1:$遺業能力番号.$B$9];2;0);0)" office:value-type="float" office:value="1" calcext:value-type="float">
            <text:p>1</text:p>
          </table:table-cell>
          <table:table-cell office:value-type="string" calcext:value-type="string">
            <text:p>https://one-draw.jp/ijinden/cardlist/002/card/02_053.png</text:p>
          </table:table-cell>
          <table:table-cell table:formula="of:=CONCATENATE([$JSON.$A$1];[.$C186];[$JSON.$B$1];[.$E186];[$JSON.$C$1];[.$F186];[$JSON.$D$1];IF(ISNA([.$S186]);&quot;null&quot;;&quot;&quot;&quot;&quot;&amp;[.$S186]&amp;&quot;&quot;&quot;&quot;);[$JSON.$E$1];[.$U186];[$JSON.$F$1];IF(ISNA([.$V186]);&quot;null&quot;;&quot;&quot;&quot;&quot;&amp;[.$V186]&amp;&quot;&quot;&quot;&quot;);[$JSON.$G$1];[.$X186];[$JSON.$H$1];[.$H186];[$JSON.$I$1];[.J186];[$JSON.$J$1];[.$L186];[$JSON.$K$1];[.$O186];[$JSON.$L$1];[.$N186];[$JSON.$M$1];[.$R186];[$JSON.$N$1];[.$T186];[$JSON.$O$1];[.$W186];[$JSON.$P$1];[.$A186];[$JSON.$Q$1];[.$B186];[$JSON.$R$1])" office:value-type="string" office:string-value="{&quot;id&quot;:&quot;2-53&quot;,&quot;name&quot;:&quot;仁王&quot;,&quot;kana&quot;:&quot;におう&quot;,&quot;traitText&quot;:null,&quot;ruleText&quot;:&quot;能力によってこれを数える際、1つでなく2つと数える。¶イジンが自分の戦場に、ちょうど2体いる間、自分の戦場のイジンは「ウォッチャー」を得る。&quot;,&quot;legacyText&quot;:&quot;魔力化&quot;,&quot;imageUrl&quot;:&quot;https://one-draw.jp/ijinden/cardlist/002/card/02_053.png&quot;,&quot;expansion&quot;:25,&quot;rarity&quot;:1,&quot;type&quot;:2,&quot;level&quot;:2,&quot;color&quot;:4,&quot;term&quot;:0,&quot;trait&quot;:0,&quot;legacy&quot;:1,&quot;orderTable&quot;:185,&quot;orderDeck&quot;:244}," calcext:value-type="string">
            <text:p>{"id":"2-53","name":"仁王","kana":"におう","traitText":null,"ruleText":"能力によってこれを数える際、1つでなく2つと数える。¶イジンが自分の戦場に、ちょうど2体いる間、自分の戦場のイジンは「ウォッチャー」を得る。","legacyText":"魔力化","imageUrl":"https://one-draw.jp/ijinden/cardlist/002/card/02_053.png","expansion":25,"rarity":1,"type":2,"level":2,"color":4,"term":0,"trait":0,"legacy":1,"orderTable":185,"orderDeck":244},</text:p>
          </table:table-cell>
          <table:table-cell table:number-columns-repeated="16347"/>
        </table:table-row>
        <table:table-row table:style-name="ro2">
          <table:table-cell office:value-type="float" office:value="186" calcext:value-type="float">
            <text:p>186</text:p>
          </table:table-cell>
          <table:table-cell office:value-type="float" office:value="279" calcext:value-type="float">
            <text:p>279</text:p>
          </table:table-cell>
          <table:table-cell office:value-type="string" calcext:value-type="string">
            <text:p>2-54</text:p>
          </table:table-cell>
          <table:table-cell office:value-type="float" office:value="54" calcext:value-type="float">
            <text:p>54</text:p>
          </table:table-cell>
          <table:table-cell office:value-type="string" calcext:value-type="string">
            <text:p>蒸気機関車</text:p>
          </table:table-cell>
          <table:table-cell office:value-type="string" calcext:value-type="string">
            <text:p>じょうききかんしゃ</text:p>
          </table:table-cell>
          <table:table-cell office:value-type="string" calcext:value-type="string">
            <text:p>第２弾ブースターパック</text:p>
          </table:table-cell>
          <table:table-cell table:formula="of:=VLOOKUP([.G187];[$収録番号.$A$1:$収録番号.$B$9];2;0)" office:value-type="float" office:value="25" calcext:value-type="float">
            <text:p>25</text:p>
          </table:table-cell>
          <table:table-cell office:value-type="string" calcext:value-type="string">
            <text:p>N</text:p>
          </table:table-cell>
          <table:table-cell table:formula="of:=VLOOKUP([.I187];[$レアリティ番号.$A$1:$レアリティ番号.$B$4];2;0)" office:value-type="float" office:value="1" calcext:value-type="float">
            <text:p>1</text:p>
          </table:table-cell>
          <table:table-cell office:value-type="string" calcext:value-type="string">
            <text:p>ハイケイ</text:p>
          </table:table-cell>
          <table:table-cell table:formula="of:=VLOOKUP([.K187];[$種類番号.$A$1:$種類番号.$B$4];2;0)" office:value-type="float" office:value="2" calcext:value-type="float">
            <text:p>2</text:p>
          </table:table-cell>
          <table:table-cell office:value-type="string" calcext:value-type="string">
            <text:p>緑</text:p>
          </table:table-cell>
          <table:table-cell table:formula="of:=VLOOKUP([.M187];[$色番号.$A$1:$色番号.$B$10];2;0)" office:value-type="float" office:value="4" calcext:value-type="float">
            <text:p>4</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8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87];[$特性番号.$A$1:$特性番号.$B$8];2;0);0)" office:value-type="float" office:value="0" calcext:value-type="float">
            <text:p>0</text:p>
          </table:table-cell>
          <table:table-cell office:value-type="string" calcext:value-type="string">
            <text:p>自分のエンドフェイズが開始したときに発動できる。自分の山札の上から2枚を見て、ハイケイをすきなだけ戦場に置く。残りを手札に加える。¶イジン召喚によって緑か黄のイジンが自分の戦場に置かれる際、そのイジンに装備させてもよい。¶装備 : 即応 これが戦場にいる間、自分の戦場のイジンは、自分の戦場のハイケイ1つにつき「パワー+500」を得る。</text:p>
          </table:table-cell>
          <table:table-cell table:style-name="ce8" table:formula="of:=NA()" office:value-type="string" office:string-value="" calcext:value-type="error">
            <text:p>#N/A</text:p>
          </table:table-cell>
          <table:table-cell table:formula="of:=IFERROR(VLOOKUP([.$V187];[$遺業能力番号.$A$1:$遺業能力番号.$B$9];2;0);0)" office:value-type="float" office:value="0" calcext:value-type="float">
            <text:p>0</text:p>
          </table:table-cell>
          <table:table-cell office:value-type="string" calcext:value-type="string">
            <text:p>https://one-draw.jp/ijinden/cardlist/002/card/02_054.png</text:p>
          </table:table-cell>
          <table:table-cell table:formula="of:=CONCATENATE([$JSON.$A$1];[.$C187];[$JSON.$B$1];[.$E187];[$JSON.$C$1];[.$F187];[$JSON.$D$1];IF(ISNA([.$S187]);&quot;null&quot;;&quot;&quot;&quot;&quot;&amp;[.$S187]&amp;&quot;&quot;&quot;&quot;);[$JSON.$E$1];[.$U187];[$JSON.$F$1];IF(ISNA([.$V187]);&quot;null&quot;;&quot;&quot;&quot;&quot;&amp;[.$V187]&amp;&quot;&quot;&quot;&quot;);[$JSON.$G$1];[.$X187];[$JSON.$H$1];[.$H187];[$JSON.$I$1];[.J187];[$JSON.$J$1];[.$L187];[$JSON.$K$1];[.$O187];[$JSON.$L$1];[.$N187];[$JSON.$M$1];[.$R187];[$JSON.$N$1];[.$T187];[$JSON.$O$1];[.$W187];[$JSON.$P$1];[.$A187];[$JSON.$Q$1];[.$B187];[$JSON.$R$1])" office:value-type="string" office:string-value="{&quot;id&quot;:&quot;2-54&quot;,&quot;name&quot;:&quot;蒸気機関車&quot;,&quot;kana&quot;:&quot;じょうききかんしゃ&quot;,&quot;traitText&quot;:null,&quot;ruleText&quot;:&quot;自分のエンドフェイズが開始したときに発動できる。自分の山札の上から2枚を見て、ハイケイをすきなだけ戦場に置く。残りを手札に加える。¶イジン召喚によって緑か黄のイジンが自分の戦場に置かれる際、そのイジンに装備させてもよい。¶装備 : 即応 これが戦場にいる間、自分の戦場のイジンは、自分の戦場のハイケイ1つにつき「パワー+500」を得る。&quot;,&quot;legacyText&quot;:null,&quot;imageUrl&quot;:&quot;https://one-draw.jp/ijinden/cardlist/002/card/02_054.png&quot;,&quot;expansion&quot;:25,&quot;rarity&quot;:1,&quot;type&quot;:2,&quot;level&quot;:7,&quot;color&quot;:4,&quot;term&quot;:0,&quot;trait&quot;:0,&quot;legacy&quot;:0,&quot;orderTable&quot;:186,&quot;orderDeck&quot;:279}," calcext:value-type="string">
            <text:p>{"id":"2-54","name":"蒸気機関車","kana":"じょうききかんしゃ","traitText":null,"ruleText":"自分のエンドフェイズが開始したときに発動できる。自分の山札の上から2枚を見て、ハイケイをすきなだけ戦場に置く。残りを手札に加える。¶イジン召喚によって緑か黄のイジンが自分の戦場に置かれる際、そのイジンに装備させてもよい。¶装備 : 即応 これが戦場にいる間、自分の戦場のイジンは、自分の戦場のハイケイ1つにつき「パワー+500」を得る。","legacyText":null,"imageUrl":"https://one-draw.jp/ijinden/cardlist/002/card/02_054.png","expansion":25,"rarity":1,"type":2,"level":7,"color":4,"term":0,"trait":0,"legacy":0,"orderTable":186,"orderDeck":279},</text:p>
          </table:table-cell>
          <table:table-cell table:number-columns-repeated="16347"/>
        </table:table-row>
        <table:table-row table:style-name="ro2">
          <table:table-cell office:value-type="float" office:value="187" calcext:value-type="float">
            <text:p>187</text:p>
          </table:table-cell>
          <table:table-cell office:value-type="float" office:value="246" calcext:value-type="float">
            <text:p>246</text:p>
          </table:table-cell>
          <table:table-cell office:value-type="string" calcext:value-type="string">
            <text:p>2-55</text:p>
          </table:table-cell>
          <table:table-cell office:value-type="float" office:value="55" calcext:value-type="float">
            <text:p>55</text:p>
          </table:table-cell>
          <table:table-cell office:value-type="string" calcext:value-type="string">
            <text:p>凱旋門</text:p>
          </table:table-cell>
          <table:table-cell office:value-type="string" calcext:value-type="string">
            <text:p>がいせんもん</text:p>
          </table:table-cell>
          <table:table-cell office:value-type="string" calcext:value-type="string">
            <text:p>第２弾ブースターパック</text:p>
          </table:table-cell>
          <table:table-cell table:formula="of:=VLOOKUP([.G188];[$収録番号.$A$1:$収録番号.$B$9];2;0)" office:value-type="float" office:value="25" calcext:value-type="float">
            <text:p>25</text:p>
          </table:table-cell>
          <table:table-cell office:value-type="string" calcext:value-type="string">
            <text:p>N</text:p>
          </table:table-cell>
          <table:table-cell table:formula="of:=VLOOKUP([.I188];[$レアリティ番号.$A$1:$レアリティ番号.$B$4];2;0)" office:value-type="float" office:value="1" calcext:value-type="float">
            <text:p>1</text:p>
          </table:table-cell>
          <table:table-cell office:value-type="string" calcext:value-type="string">
            <text:p>ハイケイ</text:p>
          </table:table-cell>
          <table:table-cell table:formula="of:=VLOOKUP([.K188];[$種類番号.$A$1:$種類番号.$B$4];2;0)" office:value-type="float" office:value="2" calcext:value-type="float">
            <text:p>2</text:p>
          </table:table-cell>
          <table:table-cell office:value-type="string" calcext:value-type="string">
            <text:p>黄</text:p>
          </table:table-cell>
          <table:table-cell table:formula="of:=VLOOKUP([.M188];[$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8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88];[$特性番号.$A$1:$特性番号.$B$8];2;0);0)" office:value-type="float" office:value="0" calcext:value-type="float">
            <text:p>0</text:p>
          </table:table-cell>
          <table:table-cell office:value-type="string" calcext:value-type="string">
            <text:p>戦場に「思想」カードがある間、自分の墓地にある「徴募」は、アタッカーが破壊されていなくても、バトルしているなら発動する。¶相手が4体以上でアタックしたときに発動できる。自分の山札の上から1枚をガーディアンにして戦場に置く。</text:p>
          </table:table-cell>
          <table:table-cell table:style-name="ce8" office:value-type="string" calcext:value-type="string">
            <text:p>山札の上か下に戻す</text:p>
          </table:table-cell>
          <table:table-cell table:formula="of:=IFERROR(VLOOKUP([.$V188];[$遺業能力番号.$A$1:$遺業能力番号.$B$9];2;0);0)" office:value-type="float" office:value="7" calcext:value-type="float">
            <text:p>7</text:p>
          </table:table-cell>
          <table:table-cell office:value-type="string" calcext:value-type="string">
            <text:p>https://one-draw.jp/ijinden/cardlist/002/card/02_055.png</text:p>
          </table:table-cell>
          <table:table-cell table:formula="of:=CONCATENATE([$JSON.$A$1];[.$C188];[$JSON.$B$1];[.$E188];[$JSON.$C$1];[.$F188];[$JSON.$D$1];IF(ISNA([.$S188]);&quot;null&quot;;&quot;&quot;&quot;&quot;&amp;[.$S188]&amp;&quot;&quot;&quot;&quot;);[$JSON.$E$1];[.$U188];[$JSON.$F$1];IF(ISNA([.$V188]);&quot;null&quot;;&quot;&quot;&quot;&quot;&amp;[.$V188]&amp;&quot;&quot;&quot;&quot;);[$JSON.$G$1];[.$X188];[$JSON.$H$1];[.$H188];[$JSON.$I$1];[.J188];[$JSON.$J$1];[.$L188];[$JSON.$K$1];[.$O188];[$JSON.$L$1];[.$N188];[$JSON.$M$1];[.$R188];[$JSON.$N$1];[.$T188];[$JSON.$O$1];[.$W188];[$JSON.$P$1];[.$A188];[$JSON.$Q$1];[.$B188];[$JSON.$R$1])" office:value-type="string" office:string-value="{&quot;id&quot;:&quot;2-55&quot;,&quot;name&quot;:&quot;凱旋門&quot;,&quot;kana&quot;:&quot;がいせんもん&quot;,&quot;traitText&quot;:null,&quot;ruleText&quot;:&quot;戦場に「思想」カードがある間、自分の墓地にある「徴募」は、アタッカーが破壊されていなくても、バトルしているなら発動する。¶相手が4体以上でアタックしたときに発動できる。自分の山札の上から1枚をガーディアンにして戦場に置く。&quot;,&quot;legacyText&quot;:&quot;山札の上か下に戻す&quot;,&quot;imageUrl&quot;:&quot;https://one-draw.jp/ijinden/cardlist/002/card/02_055.png&quot;,&quot;expansion&quot;:25,&quot;rarity&quot;:1,&quot;type&quot;:2,&quot;level&quot;:2,&quot;color&quot;:8,&quot;term&quot;:0,&quot;trait&quot;:0,&quot;legacy&quot;:7,&quot;orderTable&quot;:187,&quot;orderDeck&quot;:246}," calcext:value-type="string">
            <text:p>{"id":"2-55","name":"凱旋門","kana":"がいせんもん","traitText":null,"ruleText":"戦場に「思想」カードがある間、自分の墓地にある「徴募」は、アタッカーが破壊されていなくても、バトルしているなら発動する。¶相手が4体以上でアタックしたときに発動できる。自分の山札の上から1枚をガーディアンにして戦場に置く。","legacyText":"山札の上か下に戻す","imageUrl":"https://one-draw.jp/ijinden/cardlist/002/card/02_055.png","expansion":25,"rarity":1,"type":2,"level":2,"color":8,"term":0,"trait":0,"legacy":7,"orderTable":187,"orderDeck":246},</text:p>
          </table:table-cell>
          <table:table-cell table:number-columns-repeated="16347"/>
        </table:table-row>
        <table:table-row table:style-name="ro2">
          <table:table-cell office:value-type="float" office:value="188" calcext:value-type="float">
            <text:p>188</text:p>
          </table:table-cell>
          <table:table-cell office:value-type="float" office:value="256" calcext:value-type="float">
            <text:p>256</text:p>
          </table:table-cell>
          <table:table-cell office:value-type="string" calcext:value-type="string">
            <text:p>2-56</text:p>
          </table:table-cell>
          <table:table-cell office:value-type="float" office:value="56" calcext:value-type="float">
            <text:p>56</text:p>
          </table:table-cell>
          <table:table-cell office:value-type="string" calcext:value-type="string">
            <text:p>三層の舎利殿</text:p>
          </table:table-cell>
          <table:table-cell office:value-type="string" calcext:value-type="string">
            <text:p>さんそうのしゃりでん</text:p>
          </table:table-cell>
          <table:table-cell office:value-type="string" calcext:value-type="string">
            <text:p>第２弾ブースターパック</text:p>
          </table:table-cell>
          <table:table-cell table:formula="of:=VLOOKUP([.G189];[$収録番号.$A$1:$収録番号.$B$9];2;0)" office:value-type="float" office:value="25" calcext:value-type="float">
            <text:p>25</text:p>
          </table:table-cell>
          <table:table-cell office:value-type="string" calcext:value-type="string">
            <text:p>N</text:p>
          </table:table-cell>
          <table:table-cell table:formula="of:=VLOOKUP([.I189];[$レアリティ番号.$A$1:$レアリティ番号.$B$4];2;0)" office:value-type="float" office:value="1" calcext:value-type="float">
            <text:p>1</text:p>
          </table:table-cell>
          <table:table-cell office:value-type="string" calcext:value-type="string">
            <text:p>ハイケイ</text:p>
          </table:table-cell>
          <table:table-cell table:formula="of:=VLOOKUP([.K189];[$種類番号.$A$1:$種類番号.$B$4];2;0)" office:value-type="float" office:value="2" calcext:value-type="float">
            <text:p>2</text:p>
          </table:table-cell>
          <table:table-cell office:value-type="string" calcext:value-type="string">
            <text:p>黄</text:p>
          </table:table-cell>
          <table:table-cell table:formula="of:=VLOOKUP([.M189];[$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8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89];[$特性番号.$A$1:$特性番号.$B$8];2;0);0)" office:value-type="float" office:value="0" calcext:value-type="float">
            <text:p>0</text:p>
          </table:table-cell>
          <table:table-cell office:value-type="string" calcext:value-type="string">
            <text:p>これが戦場にある間「色：赤 青 緑」を得る。¶自分のエンドフェイズが開始したとき、自分の山札の上から1枚を見る。¶自分のエンドフェイズが開始したときに発動できる。このハイケイを破壊して、自分の山札をシャッフルする。</text:p>
          </table:table-cell>
          <table:table-cell table:style-name="ce8" office:value-type="string" calcext:value-type="string">
            <text:p>山札の上か下に戻す</text:p>
          </table:table-cell>
          <table:table-cell table:formula="of:=IFERROR(VLOOKUP([.$V189];[$遺業能力番号.$A$1:$遺業能力番号.$B$9];2;0);0)" office:value-type="float" office:value="7" calcext:value-type="float">
            <text:p>7</text:p>
          </table:table-cell>
          <table:table-cell office:value-type="string" calcext:value-type="string">
            <text:p>https://one-draw.jp/ijinden/cardlist/002/card/02_056.png</text:p>
          </table:table-cell>
          <table:table-cell table:formula="of:=CONCATENATE([$JSON.$A$1];[.$C189];[$JSON.$B$1];[.$E189];[$JSON.$C$1];[.$F189];[$JSON.$D$1];IF(ISNA([.$S189]);&quot;null&quot;;&quot;&quot;&quot;&quot;&amp;[.$S189]&amp;&quot;&quot;&quot;&quot;);[$JSON.$E$1];[.$U189];[$JSON.$F$1];IF(ISNA([.$V189]);&quot;null&quot;;&quot;&quot;&quot;&quot;&amp;[.$V189]&amp;&quot;&quot;&quot;&quot;);[$JSON.$G$1];[.$X189];[$JSON.$H$1];[.$H189];[$JSON.$I$1];[.J189];[$JSON.$J$1];[.$L189];[$JSON.$K$1];[.$O189];[$JSON.$L$1];[.$N189];[$JSON.$M$1];[.$R189];[$JSON.$N$1];[.$T189];[$JSON.$O$1];[.$W189];[$JSON.$P$1];[.$A189];[$JSON.$Q$1];[.$B189];[$JSON.$R$1])" office:value-type="string" office:string-value="{&quot;id&quot;:&quot;2-56&quot;,&quot;name&quot;:&quot;三層の舎利殿&quot;,&quot;kana&quot;:&quot;さんそうのしゃりでん&quot;,&quot;traitText&quot;:null,&quot;ruleText&quot;:&quot;これが戦場にある間「色：赤 青 緑」を得る。¶自分のエンドフェイズが開始したとき、自分の山札の上から1枚を見る。¶自分のエンドフェイズが開始したときに発動できる。このハイケイを破壊して、自分の山札をシャッフルする。&quot;,&quot;legacyText&quot;:&quot;山札の上か下に戻す&quot;,&quot;imageUrl&quot;:&quot;https://one-draw.jp/ijinden/cardlist/002/card/02_056.png&quot;,&quot;expansion&quot;:25,&quot;rarity&quot;:1,&quot;type&quot;:2,&quot;level&quot;:3,&quot;color&quot;:8,&quot;term&quot;:0,&quot;trait&quot;:0,&quot;legacy&quot;:7,&quot;orderTable&quot;:188,&quot;orderDeck&quot;:256}," calcext:value-type="string">
            <text:p>{"id":"2-56","name":"三層の舎利殿","kana":"さんそうのしゃりでん","traitText":null,"ruleText":"これが戦場にある間「色：赤 青 緑」を得る。¶自分のエンドフェイズが開始したとき、自分の山札の上から1枚を見る。¶自分のエンドフェイズが開始したときに発動できる。このハイケイを破壊して、自分の山札をシャッフルする。","legacyText":"山札の上か下に戻す","imageUrl":"https://one-draw.jp/ijinden/cardlist/002/card/02_056.png","expansion":25,"rarity":1,"type":2,"level":3,"color":8,"term":0,"trait":0,"legacy":7,"orderTable":188,"orderDeck":256},</text:p>
          </table:table-cell>
          <table:table-cell table:number-columns-repeated="16347"/>
        </table:table-row>
        <table:table-row table:style-name="ro2">
          <table:table-cell office:value-type="float" office:value="189" calcext:value-type="float">
            <text:p>189</text:p>
          </table:table-cell>
          <table:table-cell office:value-type="float" office:value="334" calcext:value-type="float">
            <text:p>334</text:p>
          </table:table-cell>
          <table:table-cell office:value-type="string" calcext:value-type="string">
            <text:p>2-57</text:p>
          </table:table-cell>
          <table:table-cell office:value-type="float" office:value="57" calcext:value-type="float">
            <text:p>57</text:p>
          </table:table-cell>
          <table:table-cell office:value-type="string" calcext:value-type="string">
            <text:p>スペクター</text:p>
          </table:table-cell>
          <table:table-cell office:value-type="string" calcext:value-type="string">
            <text:p>すぺくたー</text:p>
          </table:table-cell>
          <table:table-cell office:value-type="string" calcext:value-type="string">
            <text:p>第２弾ブースターパック</text:p>
          </table:table-cell>
          <table:table-cell table:formula="of:=VLOOKUP([.G190];[$収録番号.$A$1:$収録番号.$B$9];2;0)" office:value-type="float" office:value="25" calcext:value-type="float">
            <text:p>25</text:p>
          </table:table-cell>
          <table:table-cell office:value-type="string" calcext:value-type="string">
            <text:p>N</text:p>
          </table:table-cell>
          <table:table-cell table:formula="of:=VLOOKUP([.I190];[$レアリティ番号.$A$1:$レアリティ番号.$B$4];2;0)" office:value-type="float" office:value="1" calcext:value-type="float">
            <text:p>1</text:p>
          </table:table-cell>
          <table:table-cell office:value-type="string" calcext:value-type="string">
            <text:p>マホウ</text:p>
          </table:table-cell>
          <table:table-cell table:formula="of:=VLOOKUP([.K190];[$種類番号.$A$1:$種類番号.$B$4];2;0)" office:value-type="float" office:value="3" calcext:value-type="float">
            <text:p>3</text:p>
          </table:table-cell>
          <table:table-cell office:value-type="string" calcext:value-type="string">
            <text:p>赤</text:p>
          </table:table-cell>
          <table:table-cell table:formula="of:=VLOOKUP([.M190];[$色番号.$A$1:$色番号.$B$10];2;0)"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黄魔導</text:p>
          </table:table-cell>
          <table:table-cell table:formula="of:=IFERROR(VLOOKUP([.$Q190];[$能力語番号.$A$1:$能力語番号.$B$10];2;0);0)" office:value-type="float" office:value="272" calcext:value-type="float">
            <text:p>272</text:p>
          </table:table-cell>
          <table:table-cell table:formula="of:=NA()" office:value-type="string" office:string-value="" calcext:value-type="error">
            <text:p>#N/A</text:p>
          </table:table-cell>
          <table:table-cell table:formula="of:=IFERROR(VLOOKUP([.$S190];[$特性番号.$A$1:$特性番号.$B$8];2;0);0)" office:value-type="float" office:value="0" calcext:value-type="float">
            <text:p>0</text:p>
          </table:table-cell>
          <table:table-cell office:value-type="string" calcext:value-type="string">
            <text:p>戦場のガーディアン1体を指定して発動できる。そのガーディアンを破壊する。¶黄魔導 - これの能力によって破壊されたガーディアンが墓地に置かれる際、黄のカードが自分の戦場か自分の魔力ゾーンにあるなら、墓地に置かれず、山札の下に戻される。</text:p>
          </table:table-cell>
          <table:table-cell table:style-name="ce8" table:formula="of:=NA()" office:value-type="string" office:string-value="" calcext:value-type="error">
            <text:p>#N/A</text:p>
          </table:table-cell>
          <table:table-cell table:formula="of:=IFERROR(VLOOKUP([.$V190];[$遺業能力番号.$A$1:$遺業能力番号.$B$9];2;0);0)" office:value-type="float" office:value="0" calcext:value-type="float">
            <text:p>0</text:p>
          </table:table-cell>
          <table:table-cell office:value-type="string" calcext:value-type="string">
            <text:p>https://one-draw.jp/ijinden/cardlist/002/card/02_057.png</text:p>
          </table:table-cell>
          <table:table-cell table:formula="of:=CONCATENATE([$JSON.$A$1];[.$C190];[$JSON.$B$1];[.$E190];[$JSON.$C$1];[.$F190];[$JSON.$D$1];IF(ISNA([.$S190]);&quot;null&quot;;&quot;&quot;&quot;&quot;&amp;[.$S190]&amp;&quot;&quot;&quot;&quot;);[$JSON.$E$1];[.$U190];[$JSON.$F$1];IF(ISNA([.$V190]);&quot;null&quot;;&quot;&quot;&quot;&quot;&amp;[.$V190]&amp;&quot;&quot;&quot;&quot;);[$JSON.$G$1];[.$X190];[$JSON.$H$1];[.$H190];[$JSON.$I$1];[.J190];[$JSON.$J$1];[.$L190];[$JSON.$K$1];[.$O190];[$JSON.$L$1];[.$N190];[$JSON.$M$1];[.$R190];[$JSON.$N$1];[.$T190];[$JSON.$O$1];[.$W190];[$JSON.$P$1];[.$A190];[$JSON.$Q$1];[.$B190];[$JSON.$R$1])" office:value-type="string" office:string-value="{&quot;id&quot;:&quot;2-57&quot;,&quot;name&quot;:&quot;スペクター&quot;,&quot;kana&quot;:&quot;すぺくたー&quot;,&quot;traitText&quot;:null,&quot;ruleText&quot;:&quot;戦場のガーディアン1体を指定して発動できる。そのガーディアンを破壊する。¶黄魔導 - これの能力によって破壊されたガーディアンが墓地に置かれる際、黄のカードが自分の戦場か自分の魔力ゾーンにあるなら、墓地に置かれず、山札の下に戻される。&quot;,&quot;legacyText&quot;:null,&quot;imageUrl&quot;:&quot;https://one-draw.jp/ijinden/cardlist/002/card/02_057.png&quot;,&quot;expansion&quot;:25,&quot;rarity&quot;:1,&quot;type&quot;:3,&quot;level&quot;:7,&quot;color&quot;:1,&quot;term&quot;:272,&quot;trait&quot;:0,&quot;legacy&quot;:0,&quot;orderTable&quot;:189,&quot;orderDeck&quot;:334}," calcext:value-type="string">
            <text:p>{"id":"2-57","name":"スペクター","kana":"すぺくたー","traitText":null,"ruleText":"戦場のガーディアン1体を指定して発動できる。そのガーディアンを破壊する。¶黄魔導 - これの能力によって破壊されたガーディアンが墓地に置かれる際、黄のカードが自分の戦場か自分の魔力ゾーンにあるなら、墓地に置かれず、山札の下に戻される。","legacyText":null,"imageUrl":"https://one-draw.jp/ijinden/cardlist/002/card/02_057.png","expansion":25,"rarity":1,"type":3,"level":7,"color":1,"term":272,"trait":0,"legacy":0,"orderTable":189,"orderDeck":334},</text:p>
          </table:table-cell>
          <table:table-cell table:number-columns-repeated="16347"/>
        </table:table-row>
        <table:table-row table:style-name="ro2">
          <table:table-cell office:value-type="float" office:value="190" calcext:value-type="float">
            <text:p>190</text:p>
          </table:table-cell>
          <table:table-cell office:value-type="float" office:value="292" calcext:value-type="float">
            <text:p>292</text:p>
          </table:table-cell>
          <table:table-cell office:value-type="string" calcext:value-type="string">
            <text:p>2-58</text:p>
          </table:table-cell>
          <table:table-cell office:value-type="float" office:value="58" calcext:value-type="float">
            <text:p>58</text:p>
          </table:table-cell>
          <table:table-cell office:value-type="string" calcext:value-type="string">
            <text:p>クイック</text:p>
          </table:table-cell>
          <table:table-cell office:value-type="string" calcext:value-type="string">
            <text:p>くいっく</text:p>
          </table:table-cell>
          <table:table-cell office:value-type="string" calcext:value-type="string">
            <text:p>第２弾ブースターパック</text:p>
          </table:table-cell>
          <table:table-cell table:formula="of:=VLOOKUP([.G191];[$収録番号.$A$1:$収録番号.$B$9];2;0)" office:value-type="float" office:value="25" calcext:value-type="float">
            <text:p>25</text:p>
          </table:table-cell>
          <table:table-cell office:value-type="string" calcext:value-type="string">
            <text:p>N</text:p>
          </table:table-cell>
          <table:table-cell table:formula="of:=VLOOKUP([.I191];[$レアリティ番号.$A$1:$レアリティ番号.$B$4];2;0)" office:value-type="float" office:value="1" calcext:value-type="float">
            <text:p>1</text:p>
          </table:table-cell>
          <table:table-cell office:value-type="string" calcext:value-type="string">
            <text:p>マホウ</text:p>
          </table:table-cell>
          <table:table-cell table:formula="of:=VLOOKUP([.K191];[$種類番号.$A$1:$種類番号.$B$4];2;0)" office:value-type="float" office:value="3" calcext:value-type="float">
            <text:p>3</text:p>
          </table:table-cell>
          <table:table-cell office:value-type="string" calcext:value-type="string">
            <text:p>赤</text:p>
          </table:table-cell>
          <table:table-cell table:formula="of:=VLOOKUP([.M191];[$色番号.$A$1:$色番号.$B$10];2;0)"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19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91];[$特性番号.$A$1:$特性番号.$B$8];2;0);0)" office:value-type="float" office:value="0" calcext:value-type="float">
            <text:p>0</text:p>
          </table:table-cell>
          <table:table-cell office:value-type="string" calcext:value-type="string">
            <text:p>自分の戦場のレベル5以下のイジン1体を指定して発動できる。このターンの間、そのイジンは「即応」を得る。</text:p>
          </table:table-cell>
          <table:table-cell table:style-name="ce8" table:formula="of:=NA()" office:value-type="string" office:string-value="" calcext:value-type="error">
            <text:p>#N/A</text:p>
          </table:table-cell>
          <table:table-cell table:formula="of:=IFERROR(VLOOKUP([.$V191];[$遺業能力番号.$A$1:$遺業能力番号.$B$9];2;0);0)" office:value-type="float" office:value="0" calcext:value-type="float">
            <text:p>0</text:p>
          </table:table-cell>
          <table:table-cell office:value-type="string" calcext:value-type="string">
            <text:p>https://one-draw.jp/ijinden/cardlist/002/card/02_058.png</text:p>
          </table:table-cell>
          <table:table-cell table:formula="of:=CONCATENATE([$JSON.$A$1];[.$C191];[$JSON.$B$1];[.$E191];[$JSON.$C$1];[.$F191];[$JSON.$D$1];IF(ISNA([.$S191]);&quot;null&quot;;&quot;&quot;&quot;&quot;&amp;[.$S191]&amp;&quot;&quot;&quot;&quot;);[$JSON.$E$1];[.$U191];[$JSON.$F$1];IF(ISNA([.$V191]);&quot;null&quot;;&quot;&quot;&quot;&quot;&amp;[.$V191]&amp;&quot;&quot;&quot;&quot;);[$JSON.$G$1];[.$X191];[$JSON.$H$1];[.$H191];[$JSON.$I$1];[.J191];[$JSON.$J$1];[.$L191];[$JSON.$K$1];[.$O191];[$JSON.$L$1];[.$N191];[$JSON.$M$1];[.$R191];[$JSON.$N$1];[.$T191];[$JSON.$O$1];[.$W191];[$JSON.$P$1];[.$A191];[$JSON.$Q$1];[.$B191];[$JSON.$R$1])" office:value-type="string" office:string-value="{&quot;id&quot;:&quot;2-58&quot;,&quot;name&quot;:&quot;クイック&quot;,&quot;kana&quot;:&quot;くいっく&quot;,&quot;traitText&quot;:null,&quot;ruleText&quot;:&quot;自分の戦場のレベル5以下のイジン1体を指定して発動できる。このターンの間、そのイジンは「即応」を得る。&quot;,&quot;legacyText&quot;:null,&quot;imageUrl&quot;:&quot;https://one-draw.jp/ijinden/cardlist/002/card/02_058.png&quot;,&quot;expansion&quot;:25,&quot;rarity&quot;:1,&quot;type&quot;:3,&quot;level&quot;:2,&quot;color&quot;:1,&quot;term&quot;:0,&quot;trait&quot;:0,&quot;legacy&quot;:0,&quot;orderTable&quot;:190,&quot;orderDeck&quot;:292}," calcext:value-type="string">
            <text:p>{"id":"2-58","name":"クイック","kana":"くいっく","traitText":null,"ruleText":"自分の戦場のレベル5以下のイジン1体を指定して発動できる。このターンの間、そのイジンは「即応」を得る。","legacyText":null,"imageUrl":"https://one-draw.jp/ijinden/cardlist/002/card/02_058.png","expansion":25,"rarity":1,"type":3,"level":2,"color":1,"term":0,"trait":0,"legacy":0,"orderTable":190,"orderDeck":292},</text:p>
          </table:table-cell>
          <table:table-cell table:number-columns-repeated="16347"/>
        </table:table-row>
        <table:table-row table:style-name="ro2">
          <table:table-cell office:value-type="float" office:value="191" calcext:value-type="float">
            <text:p>191</text:p>
          </table:table-cell>
          <table:table-cell office:value-type="float" office:value="306" calcext:value-type="float">
            <text:p>306</text:p>
          </table:table-cell>
          <table:table-cell office:value-type="string" calcext:value-type="string">
            <text:p>2-59</text:p>
          </table:table-cell>
          <table:table-cell office:value-type="float" office:value="59" calcext:value-type="float">
            <text:p>59</text:p>
          </table:table-cell>
          <table:table-cell office:value-type="string" calcext:value-type="string">
            <text:p>サモン</text:p>
          </table:table-cell>
          <table:table-cell office:value-type="string" calcext:value-type="string">
            <text:p>さもん</text:p>
          </table:table-cell>
          <table:table-cell office:value-type="string" calcext:value-type="string">
            <text:p>第２弾ブースターパック</text:p>
          </table:table-cell>
          <table:table-cell table:formula="of:=VLOOKUP([.G192];[$収録番号.$A$1:$収録番号.$B$9];2;0)" office:value-type="float" office:value="25" calcext:value-type="float">
            <text:p>25</text:p>
          </table:table-cell>
          <table:table-cell office:value-type="string" calcext:value-type="string">
            <text:p>N</text:p>
          </table:table-cell>
          <table:table-cell table:formula="of:=VLOOKUP([.I192];[$レアリティ番号.$A$1:$レアリティ番号.$B$4];2;0)" office:value-type="float" office:value="1" calcext:value-type="float">
            <text:p>1</text:p>
          </table:table-cell>
          <table:table-cell office:value-type="string" calcext:value-type="string">
            <text:p>マホウ</text:p>
          </table:table-cell>
          <table:table-cell table:formula="of:=VLOOKUP([.K192];[$種類番号.$A$1:$種類番号.$B$4];2;0)" office:value-type="float" office:value="3" calcext:value-type="float">
            <text:p>3</text:p>
          </table:table-cell>
          <table:table-cell office:value-type="string" calcext:value-type="string">
            <text:p>赤</text:p>
          </table:table-cell>
          <table:table-cell table:formula="of:=VLOOKUP([.M192];[$色番号.$A$1:$色番号.$B$10];2;0)"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19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92];[$特性番号.$A$1:$特性番号.$B$8];2;0);0)" office:value-type="float" office:value="0" calcext:value-type="float">
            <text:p>0</text:p>
          </table:table-cell>
          <table:table-cell office:value-type="string" calcext:value-type="string">
            <text:p>イジン召喚権+1する。</text:p>
          </table:table-cell>
          <table:table-cell table:style-name="ce8" office:value-type="string" calcext:value-type="string">
            <text:p>手札に戻す</text:p>
          </table:table-cell>
          <table:table-cell table:formula="of:=IFERROR(VLOOKUP([.$V192];[$遺業能力番号.$A$1:$遺業能力番号.$B$9];2;0);0)" office:value-type="float" office:value="5" calcext:value-type="float">
            <text:p>5</text:p>
          </table:table-cell>
          <table:table-cell office:value-type="string" calcext:value-type="string">
            <text:p>https://one-draw.jp/ijinden/cardlist/002/card/02_059.png</text:p>
          </table:table-cell>
          <table:table-cell table:formula="of:=CONCATENATE([$JSON.$A$1];[.$C192];[$JSON.$B$1];[.$E192];[$JSON.$C$1];[.$F192];[$JSON.$D$1];IF(ISNA([.$S192]);&quot;null&quot;;&quot;&quot;&quot;&quot;&amp;[.$S192]&amp;&quot;&quot;&quot;&quot;);[$JSON.$E$1];[.$U192];[$JSON.$F$1];IF(ISNA([.$V192]);&quot;null&quot;;&quot;&quot;&quot;&quot;&amp;[.$V192]&amp;&quot;&quot;&quot;&quot;);[$JSON.$G$1];[.$X192];[$JSON.$H$1];[.$H192];[$JSON.$I$1];[.J192];[$JSON.$J$1];[.$L192];[$JSON.$K$1];[.$O192];[$JSON.$L$1];[.$N192];[$JSON.$M$1];[.$R192];[$JSON.$N$1];[.$T192];[$JSON.$O$1];[.$W192];[$JSON.$P$1];[.$A192];[$JSON.$Q$1];[.$B192];[$JSON.$R$1])" office:value-type="string" office:string-value="{&quot;id&quot;:&quot;2-59&quot;,&quot;name&quot;:&quot;サモン&quot;,&quot;kana&quot;:&quot;さもん&quot;,&quot;traitText&quot;:null,&quot;ruleText&quot;:&quot;イジン召喚権+1する。&quot;,&quot;legacyText&quot;:&quot;手札に戻す&quot;,&quot;imageUrl&quot;:&quot;https://one-draw.jp/ijinden/cardlist/002/card/02_059.png&quot;,&quot;expansion&quot;:25,&quot;rarity&quot;:1,&quot;type&quot;:3,&quot;level&quot;:3,&quot;color&quot;:1,&quot;term&quot;:0,&quot;trait&quot;:0,&quot;legacy&quot;:5,&quot;orderTable&quot;:191,&quot;orderDeck&quot;:306}," calcext:value-type="string">
            <text:p>{"id":"2-59","name":"サモン","kana":"さもん","traitText":null,"ruleText":"イジン召喚権+1する。","legacyText":"手札に戻す","imageUrl":"https://one-draw.jp/ijinden/cardlist/002/card/02_059.png","expansion":25,"rarity":1,"type":3,"level":3,"color":1,"term":0,"trait":0,"legacy":5,"orderTable":191,"orderDeck":306},</text:p>
          </table:table-cell>
          <table:table-cell table:number-columns-repeated="16347"/>
        </table:table-row>
        <table:table-row table:style-name="ro2">
          <table:table-cell office:value-type="float" office:value="192" calcext:value-type="float">
            <text:p>192</text:p>
          </table:table-cell>
          <table:table-cell office:value-type="float" office:value="295" calcext:value-type="float">
            <text:p>295</text:p>
          </table:table-cell>
          <table:table-cell office:value-type="string" calcext:value-type="string">
            <text:p>2-60</text:p>
          </table:table-cell>
          <table:table-cell office:value-type="float" office:value="60" calcext:value-type="float">
            <text:p>60</text:p>
          </table:table-cell>
          <table:table-cell office:value-type="string" calcext:value-type="string">
            <text:p>フェイス</text:p>
          </table:table-cell>
          <table:table-cell office:value-type="string" calcext:value-type="string">
            <text:p>ふぇいす</text:p>
          </table:table-cell>
          <table:table-cell office:value-type="string" calcext:value-type="string">
            <text:p>第２弾ブースターパック</text:p>
          </table:table-cell>
          <table:table-cell table:formula="of:=VLOOKUP([.G193];[$収録番号.$A$1:$収録番号.$B$9];2;0)" office:value-type="float" office:value="25" calcext:value-type="float">
            <text:p>25</text:p>
          </table:table-cell>
          <table:table-cell office:value-type="string" calcext:value-type="string">
            <text:p>N</text:p>
          </table:table-cell>
          <table:table-cell table:formula="of:=VLOOKUP([.I193];[$レアリティ番号.$A$1:$レアリティ番号.$B$4];2;0)" office:value-type="float" office:value="1" calcext:value-type="float">
            <text:p>1</text:p>
          </table:table-cell>
          <table:table-cell office:value-type="string" calcext:value-type="string">
            <text:p>マホウ</text:p>
          </table:table-cell>
          <table:table-cell table:formula="of:=VLOOKUP([.K193];[$種類番号.$A$1:$種類番号.$B$4];2;0)" office:value-type="float" office:value="3" calcext:value-type="float">
            <text:p>3</text:p>
          </table:table-cell>
          <table:table-cell office:value-type="string" calcext:value-type="string">
            <text:p>青</text:p>
          </table:table-cell>
          <table:table-cell table:formula="of:=VLOOKUP([.M193];[$色番号.$A$1:$色番号.$B$10];2;0)"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19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93];[$特性番号.$A$1:$特性番号.$B$8];2;0);0)" office:value-type="float" office:value="0" calcext:value-type="float">
            <text:p>0</text:p>
          </table:table-cell>
          <table:table-cell office:value-type="string" calcext:value-type="string">
            <text:p>自分の山札の上から1枚をガーディアンにして戦場に置く。</text:p>
          </table:table-cell>
          <table:table-cell table:style-name="ce8" office:value-type="string" calcext:value-type="string">
            <text:p>手札に戻す</text:p>
          </table:table-cell>
          <table:table-cell table:formula="of:=IFERROR(VLOOKUP([.$V193];[$遺業能力番号.$A$1:$遺業能力番号.$B$9];2;0);0)" office:value-type="float" office:value="5" calcext:value-type="float">
            <text:p>5</text:p>
          </table:table-cell>
          <table:table-cell office:value-type="string" calcext:value-type="string">
            <text:p>https://one-draw.jp/ijinden/cardlist/002/card/02_060.png</text:p>
          </table:table-cell>
          <table:table-cell table:formula="of:=CONCATENATE([$JSON.$A$1];[.$C193];[$JSON.$B$1];[.$E193];[$JSON.$C$1];[.$F193];[$JSON.$D$1];IF(ISNA([.$S193]);&quot;null&quot;;&quot;&quot;&quot;&quot;&amp;[.$S193]&amp;&quot;&quot;&quot;&quot;);[$JSON.$E$1];[.$U193];[$JSON.$F$1];IF(ISNA([.$V193]);&quot;null&quot;;&quot;&quot;&quot;&quot;&amp;[.$V193]&amp;&quot;&quot;&quot;&quot;);[$JSON.$G$1];[.$X193];[$JSON.$H$1];[.$H193];[$JSON.$I$1];[.J193];[$JSON.$J$1];[.$L193];[$JSON.$K$1];[.$O193];[$JSON.$L$1];[.$N193];[$JSON.$M$1];[.$R193];[$JSON.$N$1];[.$T193];[$JSON.$O$1];[.$W193];[$JSON.$P$1];[.$A193];[$JSON.$Q$1];[.$B193];[$JSON.$R$1])" office:value-type="string" office:string-value="{&quot;id&quot;:&quot;2-60&quot;,&quot;name&quot;:&quot;フェイス&quot;,&quot;kana&quot;:&quot;ふぇいす&quot;,&quot;traitText&quot;:null,&quot;ruleText&quot;:&quot;自分の山札の上から1枚をガーディアンにして戦場に置く。&quot;,&quot;legacyText&quot;:&quot;手札に戻す&quot;,&quot;imageUrl&quot;:&quot;https://one-draw.jp/ijinden/cardlist/002/card/02_060.png&quot;,&quot;expansion&quot;:25,&quot;rarity&quot;:1,&quot;type&quot;:3,&quot;level&quot;:2,&quot;color&quot;:2,&quot;term&quot;:0,&quot;trait&quot;:0,&quot;legacy&quot;:5,&quot;orderTable&quot;:192,&quot;orderDeck&quot;:295}," calcext:value-type="string">
            <text:p>{"id":"2-60","name":"フェイス","kana":"ふぇいす","traitText":null,"ruleText":"自分の山札の上から1枚をガーディアンにして戦場に置く。","legacyText":"手札に戻す","imageUrl":"https://one-draw.jp/ijinden/cardlist/002/card/02_060.png","expansion":25,"rarity":1,"type":3,"level":2,"color":2,"term":0,"trait":0,"legacy":5,"orderTable":192,"orderDeck":295},</text:p>
          </table:table-cell>
          <table:table-cell table:number-columns-repeated="16347"/>
        </table:table-row>
        <table:table-row table:style-name="ro2">
          <table:table-cell office:value-type="float" office:value="193" calcext:value-type="float">
            <text:p>193</text:p>
          </table:table-cell>
          <table:table-cell office:value-type="float" office:value="296" calcext:value-type="float">
            <text:p>296</text:p>
          </table:table-cell>
          <table:table-cell office:value-type="string" calcext:value-type="string">
            <text:p>2-61</text:p>
          </table:table-cell>
          <table:table-cell office:value-type="float" office:value="61" calcext:value-type="float">
            <text:p>61</text:p>
          </table:table-cell>
          <table:table-cell office:value-type="string" calcext:value-type="string">
            <text:p>リドロー</text:p>
          </table:table-cell>
          <table:table-cell office:value-type="string" calcext:value-type="string">
            <text:p>りどろー</text:p>
          </table:table-cell>
          <table:table-cell office:value-type="string" calcext:value-type="string">
            <text:p>第２弾ブースターパック</text:p>
          </table:table-cell>
          <table:table-cell table:formula="of:=VLOOKUP([.G194];[$収録番号.$A$1:$収録番号.$B$9];2;0)" office:value-type="float" office:value="25" calcext:value-type="float">
            <text:p>25</text:p>
          </table:table-cell>
          <table:table-cell office:value-type="string" calcext:value-type="string">
            <text:p>N</text:p>
          </table:table-cell>
          <table:table-cell table:formula="of:=VLOOKUP([.I194];[$レアリティ番号.$A$1:$レアリティ番号.$B$4];2;0)" office:value-type="float" office:value="1" calcext:value-type="float">
            <text:p>1</text:p>
          </table:table-cell>
          <table:table-cell office:value-type="string" calcext:value-type="string">
            <text:p>マホウ</text:p>
          </table:table-cell>
          <table:table-cell table:formula="of:=VLOOKUP([.K194];[$種類番号.$A$1:$種類番号.$B$4];2;0)" office:value-type="float" office:value="3" calcext:value-type="float">
            <text:p>3</text:p>
          </table:table-cell>
          <table:table-cell office:value-type="string" calcext:value-type="string">
            <text:p>青</text:p>
          </table:table-cell>
          <table:table-cell table:formula="of:=VLOOKUP([.M194];[$色番号.$A$1:$色番号.$B$10];2;0)"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19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94];[$特性番号.$A$1:$特性番号.$B$8];2;0);0)" office:value-type="float" office:value="0" calcext:value-type="float">
            <text:p>0</text:p>
          </table:table-cell>
          <table:table-cell office:value-type="string" calcext:value-type="string">
            <text:p>2ドローして、自分の手札1枚を墓地に置く。</text:p>
          </table:table-cell>
          <table:table-cell table:style-name="ce8" office:value-type="string" calcext:value-type="string">
            <text:p>冥府発動</text:p>
          </table:table-cell>
          <table:table-cell table:formula="of:=IFERROR(VLOOKUP([.$V194];[$遺業能力番号.$A$1:$遺業能力番号.$B$9];2;0);0)" office:value-type="float" office:value="2" calcext:value-type="float">
            <text:p>2</text:p>
          </table:table-cell>
          <table:table-cell office:value-type="string" calcext:value-type="string">
            <text:p>https://one-draw.jp/ijinden/cardlist/002/card/02_061.png</text:p>
          </table:table-cell>
          <table:table-cell table:formula="of:=CONCATENATE([$JSON.$A$1];[.$C194];[$JSON.$B$1];[.$E194];[$JSON.$C$1];[.$F194];[$JSON.$D$1];IF(ISNA([.$S194]);&quot;null&quot;;&quot;&quot;&quot;&quot;&amp;[.$S194]&amp;&quot;&quot;&quot;&quot;);[$JSON.$E$1];[.$U194];[$JSON.$F$1];IF(ISNA([.$V194]);&quot;null&quot;;&quot;&quot;&quot;&quot;&amp;[.$V194]&amp;&quot;&quot;&quot;&quot;);[$JSON.$G$1];[.$X194];[$JSON.$H$1];[.$H194];[$JSON.$I$1];[.J194];[$JSON.$J$1];[.$L194];[$JSON.$K$1];[.$O194];[$JSON.$L$1];[.$N194];[$JSON.$M$1];[.$R194];[$JSON.$N$1];[.$T194];[$JSON.$O$1];[.$W194];[$JSON.$P$1];[.$A194];[$JSON.$Q$1];[.$B194];[$JSON.$R$1])" office:value-type="string" office:string-value="{&quot;id&quot;:&quot;2-61&quot;,&quot;name&quot;:&quot;リドロー&quot;,&quot;kana&quot;:&quot;りどろー&quot;,&quot;traitText&quot;:null,&quot;ruleText&quot;:&quot;2ドローして、自分の手札1枚を墓地に置く。&quot;,&quot;legacyText&quot;:&quot;冥府発動&quot;,&quot;imageUrl&quot;:&quot;https://one-draw.jp/ijinden/cardlist/002/card/02_061.png&quot;,&quot;expansion&quot;:25,&quot;rarity&quot;:1,&quot;type&quot;:3,&quot;level&quot;:2,&quot;color&quot;:2,&quot;term&quot;:0,&quot;trait&quot;:0,&quot;legacy&quot;:2,&quot;orderTable&quot;:193,&quot;orderDeck&quot;:296}," calcext:value-type="string">
            <text:p>{"id":"2-61","name":"リドロー","kana":"りどろー","traitText":null,"ruleText":"2ドローして、自分の手札1枚を墓地に置く。","legacyText":"冥府発動","imageUrl":"https://one-draw.jp/ijinden/cardlist/002/card/02_061.png","expansion":25,"rarity":1,"type":3,"level":2,"color":2,"term":0,"trait":0,"legacy":2,"orderTable":193,"orderDeck":296},</text:p>
          </table:table-cell>
          <table:table-cell table:number-columns-repeated="16347"/>
        </table:table-row>
        <table:table-row table:style-name="ro2">
          <table:table-cell office:value-type="float" office:value="194" calcext:value-type="float">
            <text:p>194</text:p>
          </table:table-cell>
          <table:table-cell office:value-type="float" office:value="320" calcext:value-type="float">
            <text:p>320</text:p>
          </table:table-cell>
          <table:table-cell office:value-type="string" calcext:value-type="string">
            <text:p>2-62</text:p>
          </table:table-cell>
          <table:table-cell office:value-type="float" office:value="62" calcext:value-type="float">
            <text:p>62</text:p>
          </table:table-cell>
          <table:table-cell office:value-type="string" calcext:value-type="string">
            <text:p>テンペスト</text:p>
          </table:table-cell>
          <table:table-cell office:value-type="string" calcext:value-type="string">
            <text:p>てんぺすと</text:p>
          </table:table-cell>
          <table:table-cell office:value-type="string" calcext:value-type="string">
            <text:p>第２弾ブースターパック</text:p>
          </table:table-cell>
          <table:table-cell table:formula="of:=VLOOKUP([.G195];[$収録番号.$A$1:$収録番号.$B$9];2;0)" office:value-type="float" office:value="25" calcext:value-type="float">
            <text:p>25</text:p>
          </table:table-cell>
          <table:table-cell office:value-type="string" calcext:value-type="string">
            <text:p>N</text:p>
          </table:table-cell>
          <table:table-cell table:formula="of:=VLOOKUP([.I195];[$レアリティ番号.$A$1:$レアリティ番号.$B$4];2;0)" office:value-type="float" office:value="1" calcext:value-type="float">
            <text:p>1</text:p>
          </table:table-cell>
          <table:table-cell office:value-type="string" calcext:value-type="string">
            <text:p>マホウ</text:p>
          </table:table-cell>
          <table:table-cell table:formula="of:=VLOOKUP([.K195];[$種類番号.$A$1:$種類番号.$B$4];2;0)" office:value-type="float" office:value="3" calcext:value-type="float">
            <text:p>3</text:p>
          </table:table-cell>
          <table:table-cell office:value-type="string" calcext:value-type="string">
            <text:p>青</text:p>
          </table:table-cell>
          <table:table-cell table:formula="of:=VLOOKUP([.M195];[$色番号.$A$1:$色番号.$B$10];2;0)"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19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95];[$特性番号.$A$1:$特性番号.$B$8];2;0);0)" office:value-type="float" office:value="0" calcext:value-type="float">
            <text:p>0</text:p>
          </table:table-cell>
          <table:table-cell office:value-type="string" calcext:value-type="string">
            <text:p>相手の戦場の寝ているイジンすべてを手札に戻す。</text:p>
          </table:table-cell>
          <table:table-cell table:style-name="ce8" office:value-type="string" calcext:value-type="string">
            <text:p>冥府発動</text:p>
          </table:table-cell>
          <table:table-cell table:formula="of:=IFERROR(VLOOKUP([.$V195];[$遺業能力番号.$A$1:$遺業能力番号.$B$9];2;0);0)" office:value-type="float" office:value="2" calcext:value-type="float">
            <text:p>2</text:p>
          </table:table-cell>
          <table:table-cell office:value-type="string" calcext:value-type="string">
            <text:p>https://one-draw.jp/ijinden/cardlist/002/card/02_062.png</text:p>
          </table:table-cell>
          <table:table-cell table:formula="of:=CONCATENATE([$JSON.$A$1];[.$C195];[$JSON.$B$1];[.$E195];[$JSON.$C$1];[.$F195];[$JSON.$D$1];IF(ISNA([.$S195]);&quot;null&quot;;&quot;&quot;&quot;&quot;&amp;[.$S195]&amp;&quot;&quot;&quot;&quot;);[$JSON.$E$1];[.$U195];[$JSON.$F$1];IF(ISNA([.$V195]);&quot;null&quot;;&quot;&quot;&quot;&quot;&amp;[.$V195]&amp;&quot;&quot;&quot;&quot;);[$JSON.$G$1];[.$X195];[$JSON.$H$1];[.$H195];[$JSON.$I$1];[.J195];[$JSON.$J$1];[.$L195];[$JSON.$K$1];[.$O195];[$JSON.$L$1];[.$N195];[$JSON.$M$1];[.$R195];[$JSON.$N$1];[.$T195];[$JSON.$O$1];[.$W195];[$JSON.$P$1];[.$A195];[$JSON.$Q$1];[.$B195];[$JSON.$R$1])" office:value-type="string" office:string-value="{&quot;id&quot;:&quot;2-62&quot;,&quot;name&quot;:&quot;テンペスト&quot;,&quot;kana&quot;:&quot;てんぺすと&quot;,&quot;traitText&quot;:null,&quot;ruleText&quot;:&quot;相手の戦場の寝ているイジンすべてを手札に戻す。&quot;,&quot;legacyText&quot;:&quot;冥府発動&quot;,&quot;imageUrl&quot;:&quot;https://one-draw.jp/ijinden/cardlist/002/card/02_062.png&quot;,&quot;expansion&quot;:25,&quot;rarity&quot;:1,&quot;type&quot;:3,&quot;level&quot;:4,&quot;color&quot;:2,&quot;term&quot;:0,&quot;trait&quot;:0,&quot;legacy&quot;:2,&quot;orderTable&quot;:194,&quot;orderDeck&quot;:320}," calcext:value-type="string">
            <text:p>{"id":"2-62","name":"テンペスト","kana":"てんぺすと","traitText":null,"ruleText":"相手の戦場の寝ているイジンすべてを手札に戻す。","legacyText":"冥府発動","imageUrl":"https://one-draw.jp/ijinden/cardlist/002/card/02_062.png","expansion":25,"rarity":1,"type":3,"level":4,"color":2,"term":0,"trait":0,"legacy":2,"orderTable":194,"orderDeck":320},</text:p>
          </table:table-cell>
          <table:table-cell table:number-columns-repeated="16347"/>
        </table:table-row>
        <table:table-row table:style-name="ro2">
          <table:table-cell office:value-type="float" office:value="195" calcext:value-type="float">
            <text:p>195</text:p>
          </table:table-cell>
          <table:table-cell office:value-type="float" office:value="322" calcext:value-type="float">
            <text:p>322</text:p>
          </table:table-cell>
          <table:table-cell office:value-type="string" calcext:value-type="string">
            <text:p>2-63</text:p>
          </table:table-cell>
          <table:table-cell office:value-type="float" office:value="63" calcext:value-type="float">
            <text:p>63</text:p>
          </table:table-cell>
          <table:table-cell office:value-type="string" calcext:value-type="string">
            <text:p>ミューテイション</text:p>
          </table:table-cell>
          <table:table-cell office:value-type="string" calcext:value-type="string">
            <text:p>みゅーていしょん</text:p>
          </table:table-cell>
          <table:table-cell office:value-type="string" calcext:value-type="string">
            <text:p>第２弾ブースターパック</text:p>
          </table:table-cell>
          <table:table-cell table:formula="of:=VLOOKUP([.G196];[$収録番号.$A$1:$収録番号.$B$9];2;0)" office:value-type="float" office:value="25" calcext:value-type="float">
            <text:p>25</text:p>
          </table:table-cell>
          <table:table-cell office:value-type="string" calcext:value-type="string">
            <text:p>N</text:p>
          </table:table-cell>
          <table:table-cell table:formula="of:=VLOOKUP([.I196];[$レアリティ番号.$A$1:$レアリティ番号.$B$4];2;0)" office:value-type="float" office:value="1" calcext:value-type="float">
            <text:p>1</text:p>
          </table:table-cell>
          <table:table-cell office:value-type="string" calcext:value-type="string">
            <text:p>マホウ</text:p>
          </table:table-cell>
          <table:table-cell table:formula="of:=VLOOKUP([.K196];[$種類番号.$A$1:$種類番号.$B$4];2;0)" office:value-type="float" office:value="3" calcext:value-type="float">
            <text:p>3</text:p>
          </table:table-cell>
          <table:table-cell office:value-type="string" calcext:value-type="string">
            <text:p>緑</text:p>
          </table:table-cell>
          <table:table-cell table:formula="of:=VLOOKUP([.M196];[$色番号.$A$1:$色番号.$B$10];2;0)" office:value-type="float" office:value="4" calcext:value-type="float">
            <text:p>4</text:p>
          </table:table-cell>
          <table:table-cell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IFERROR(VLOOKUP([.$Q19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96];[$特性番号.$A$1:$特性番号.$B$8];2;0);0)" office:value-type="float" office:value="0" calcext:value-type="float">
            <text:p>0</text:p>
          </table:table-cell>
          <table:table-cell office:value-type="string" calcext:value-type="string">
            <text:p>戦場のガーディアン1体か、魔力ゾーンの裏のカード1つを指定して発動できる。そのカードを墓地に置き、レベル6以下のイジンなら戦場に置く。</text:p>
          </table:table-cell>
          <table:table-cell table:style-name="ce8" office:value-type="string" calcext:value-type="string">
            <text:p>魔力化</text:p>
          </table:table-cell>
          <table:table-cell table:formula="of:=IFERROR(VLOOKUP([.$V196];[$遺業能力番号.$A$1:$遺業能力番号.$B$9];2;0);0)" office:value-type="float" office:value="1" calcext:value-type="float">
            <text:p>1</text:p>
          </table:table-cell>
          <table:table-cell office:value-type="string" calcext:value-type="string">
            <text:p>https://one-draw.jp/ijinden/cardlist/002/card/02_063.png</text:p>
          </table:table-cell>
          <table:table-cell table:formula="of:=CONCATENATE([$JSON.$A$1];[.$C196];[$JSON.$B$1];[.$E196];[$JSON.$C$1];[.$F196];[$JSON.$D$1];IF(ISNA([.$S196]);&quot;null&quot;;&quot;&quot;&quot;&quot;&amp;[.$S196]&amp;&quot;&quot;&quot;&quot;);[$JSON.$E$1];[.$U196];[$JSON.$F$1];IF(ISNA([.$V196]);&quot;null&quot;;&quot;&quot;&quot;&quot;&amp;[.$V196]&amp;&quot;&quot;&quot;&quot;);[$JSON.$G$1];[.$X196];[$JSON.$H$1];[.$H196];[$JSON.$I$1];[.J196];[$JSON.$J$1];[.$L196];[$JSON.$K$1];[.$O196];[$JSON.$L$1];[.$N196];[$JSON.$M$1];[.$R196];[$JSON.$N$1];[.$T196];[$JSON.$O$1];[.$W196];[$JSON.$P$1];[.$A196];[$JSON.$Q$1];[.$B196];[$JSON.$R$1])" office:value-type="string" office:string-value="{&quot;id&quot;:&quot;2-63&quot;,&quot;name&quot;:&quot;ミューテイション&quot;,&quot;kana&quot;:&quot;みゅーていしょん&quot;,&quot;traitText&quot;:null,&quot;ruleText&quot;:&quot;戦場のガーディアン1体か、魔力ゾーンの裏のカード1つを指定して発動できる。そのカードを墓地に置き、レベル6以下のイジンなら戦場に置く。&quot;,&quot;legacyText&quot;:&quot;魔力化&quot;,&quot;imageUrl&quot;:&quot;https://one-draw.jp/ijinden/cardlist/002/card/02_063.png&quot;,&quot;expansion&quot;:25,&quot;rarity&quot;:1,&quot;type&quot;:3,&quot;level&quot;:4,&quot;color&quot;:4,&quot;term&quot;:0,&quot;trait&quot;:0,&quot;legacy&quot;:1,&quot;orderTable&quot;:195,&quot;orderDeck&quot;:322}," calcext:value-type="string">
            <text:p>{"id":"2-63","name":"ミューテイション","kana":"みゅーていしょん","traitText":null,"ruleText":"戦場のガーディアン1体か、魔力ゾーンの裏のカード1つを指定して発動できる。そのカードを墓地に置き、レベル6以下のイジンなら戦場に置く。","legacyText":"魔力化","imageUrl":"https://one-draw.jp/ijinden/cardlist/002/card/02_063.png","expansion":25,"rarity":1,"type":3,"level":4,"color":4,"term":0,"trait":0,"legacy":1,"orderTable":195,"orderDeck":322},</text:p>
          </table:table-cell>
          <table:table-cell table:number-columns-repeated="16347"/>
        </table:table-row>
        <table:table-row table:style-name="ro2">
          <table:table-cell office:value-type="float" office:value="196" calcext:value-type="float">
            <text:p>196</text:p>
          </table:table-cell>
          <table:table-cell office:value-type="float" office:value="329" calcext:value-type="float">
            <text:p>329</text:p>
          </table:table-cell>
          <table:table-cell office:value-type="string" calcext:value-type="string">
            <text:p>2-64</text:p>
          </table:table-cell>
          <table:table-cell office:value-type="float" office:value="64" calcext:value-type="float">
            <text:p>64</text:p>
          </table:table-cell>
          <table:table-cell office:value-type="string" calcext:value-type="string">
            <text:p>ライブラリー</text:p>
          </table:table-cell>
          <table:table-cell office:value-type="string" calcext:value-type="string">
            <text:p>らいぶらりー</text:p>
          </table:table-cell>
          <table:table-cell office:value-type="string" calcext:value-type="string">
            <text:p>第２弾ブースターパック</text:p>
          </table:table-cell>
          <table:table-cell table:formula="of:=VLOOKUP([.G197];[$収録番号.$A$1:$収録番号.$B$9];2;0)" office:value-type="float" office:value="25" calcext:value-type="float">
            <text:p>25</text:p>
          </table:table-cell>
          <table:table-cell office:value-type="string" calcext:value-type="string">
            <text:p>N</text:p>
          </table:table-cell>
          <table:table-cell table:formula="of:=VLOOKUP([.I197];[$レアリティ番号.$A$1:$レアリティ番号.$B$4];2;0)" office:value-type="float" office:value="1" calcext:value-type="float">
            <text:p>1</text:p>
          </table:table-cell>
          <table:table-cell office:value-type="string" calcext:value-type="string">
            <text:p>マホウ</text:p>
          </table:table-cell>
          <table:table-cell table:formula="of:=VLOOKUP([.K197];[$種類番号.$A$1:$種類番号.$B$4];2;0)" office:value-type="float" office:value="3" calcext:value-type="float">
            <text:p>3</text:p>
          </table:table-cell>
          <table:table-cell office:value-type="string" calcext:value-type="string">
            <text:p>緑</text:p>
          </table:table-cell>
          <table:table-cell table:formula="of:=VLOOKUP([.M197];[$色番号.$A$1:$色番号.$B$10];2;0)"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table:formula="of:=NA()" office:value-type="string" office:string-value="" calcext:value-type="error">
            <text:p>#N/A</text:p>
          </table:table-cell>
          <table:table-cell table:formula="of:=IFERROR(VLOOKUP([.$Q19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97];[$特性番号.$A$1:$特性番号.$B$8];2;0);0)" office:value-type="float" office:value="0" calcext:value-type="float">
            <text:p>0</text:p>
          </table:table-cell>
          <table:table-cell office:value-type="string" calcext:value-type="string">
            <text:p>自分の戦場のガーディアンすべてを裏のまま魔力ゾーンに置き、自分の山札の上から2枚をガーディアンにして戦場に置く。</text:p>
          </table:table-cell>
          <table:table-cell table:style-name="ce8" office:value-type="string" calcext:value-type="string">
            <text:p>魔力化</text:p>
          </table:table-cell>
          <table:table-cell table:formula="of:=IFERROR(VLOOKUP([.$V197];[$遺業能力番号.$A$1:$遺業能力番号.$B$9];2;0);0)" office:value-type="float" office:value="1" calcext:value-type="float">
            <text:p>1</text:p>
          </table:table-cell>
          <table:table-cell office:value-type="string" calcext:value-type="string">
            <text:p>https://one-draw.jp/ijinden/cardlist/002/card/02_064.png</text:p>
          </table:table-cell>
          <table:table-cell table:formula="of:=CONCATENATE([$JSON.$A$1];[.$C197];[$JSON.$B$1];[.$E197];[$JSON.$C$1];[.$F197];[$JSON.$D$1];IF(ISNA([.$S197]);&quot;null&quot;;&quot;&quot;&quot;&quot;&amp;[.$S197]&amp;&quot;&quot;&quot;&quot;);[$JSON.$E$1];[.$U197];[$JSON.$F$1];IF(ISNA([.$V197]);&quot;null&quot;;&quot;&quot;&quot;&quot;&amp;[.$V197]&amp;&quot;&quot;&quot;&quot;);[$JSON.$G$1];[.$X197];[$JSON.$H$1];[.$H197];[$JSON.$I$1];[.J197];[$JSON.$J$1];[.$L197];[$JSON.$K$1];[.$O197];[$JSON.$L$1];[.$N197];[$JSON.$M$1];[.$R197];[$JSON.$N$1];[.$T197];[$JSON.$O$1];[.$W197];[$JSON.$P$1];[.$A197];[$JSON.$Q$1];[.$B197];[$JSON.$R$1])" office:value-type="string" office:string-value="{&quot;id&quot;:&quot;2-64&quot;,&quot;name&quot;:&quot;ライブラリー&quot;,&quot;kana&quot;:&quot;らいぶらりー&quot;,&quot;traitText&quot;:null,&quot;ruleText&quot;:&quot;自分の戦場のガーディアンすべてを裏のまま魔力ゾーンに置き、自分の山札の上から2枚をガーディアンにして戦場に置く。&quot;,&quot;legacyText&quot;:&quot;魔力化&quot;,&quot;imageUrl&quot;:&quot;https://one-draw.jp/ijinden/cardlist/002/card/02_064.png&quot;,&quot;expansion&quot;:25,&quot;rarity&quot;:1,&quot;type&quot;:3,&quot;level&quot;:5,&quot;color&quot;:4,&quot;term&quot;:0,&quot;trait&quot;:0,&quot;legacy&quot;:1,&quot;orderTable&quot;:196,&quot;orderDeck&quot;:329}," calcext:value-type="string">
            <text:p>{"id":"2-64","name":"ライブラリー","kana":"らいぶらりー","traitText":null,"ruleText":"自分の戦場のガーディアンすべてを裏のまま魔力ゾーンに置き、自分の山札の上から2枚をガーディアンにして戦場に置く。","legacyText":"魔力化","imageUrl":"https://one-draw.jp/ijinden/cardlist/002/card/02_064.png","expansion":25,"rarity":1,"type":3,"level":5,"color":4,"term":0,"trait":0,"legacy":1,"orderTable":196,"orderDeck":329},</text:p>
          </table:table-cell>
          <table:table-cell table:number-columns-repeated="16347"/>
        </table:table-row>
        <table:table-row table:style-name="ro2">
          <table:table-cell office:value-type="float" office:value="197" calcext:value-type="float">
            <text:p>197</text:p>
          </table:table-cell>
          <table:table-cell office:value-type="float" office:value="284" calcext:value-type="float">
            <text:p>284</text:p>
          </table:table-cell>
          <table:table-cell office:value-type="string" calcext:value-type="string">
            <text:p>2-65</text:p>
          </table:table-cell>
          <table:table-cell office:value-type="float" office:value="65" calcext:value-type="float">
            <text:p>65</text:p>
          </table:table-cell>
          <table:table-cell office:value-type="string" calcext:value-type="string">
            <text:p>チャージ</text:p>
          </table:table-cell>
          <table:table-cell office:value-type="string" calcext:value-type="string">
            <text:p>ちゃーじ</text:p>
          </table:table-cell>
          <table:table-cell office:value-type="string" calcext:value-type="string">
            <text:p>第２弾ブースターパック</text:p>
          </table:table-cell>
          <table:table-cell table:formula="of:=VLOOKUP([.G198];[$収録番号.$A$1:$収録番号.$B$9];2;0)" office:value-type="float" office:value="25" calcext:value-type="float">
            <text:p>25</text:p>
          </table:table-cell>
          <table:table-cell office:value-type="string" calcext:value-type="string">
            <text:p>N</text:p>
          </table:table-cell>
          <table:table-cell table:formula="of:=VLOOKUP([.I198];[$レアリティ番号.$A$1:$レアリティ番号.$B$4];2;0)" office:value-type="float" office:value="1" calcext:value-type="float">
            <text:p>1</text:p>
          </table:table-cell>
          <table:table-cell office:value-type="string" calcext:value-type="string">
            <text:p>マホウ</text:p>
          </table:table-cell>
          <table:table-cell table:formula="of:=VLOOKUP([.K198];[$種類番号.$A$1:$種類番号.$B$4];2;0)" office:value-type="float" office:value="3" calcext:value-type="float">
            <text:p>3</text:p>
          </table:table-cell>
          <table:table-cell office:value-type="string" calcext:value-type="string">
            <text:p>緑</text:p>
          </table:table-cell>
          <table:table-cell table:formula="of:=VLOOKUP([.M198];[$色番号.$A$1:$色番号.$B$10];2;0)" office:value-type="float" office:value="4" calcext:value-type="float">
            <text:p>4</text:p>
          </table:table-cell>
          <table:table-cell table:number-columns-repeated="2" office:value-type="float" office:value="1" calcext:value-type="float">
            <text:p>1</text:p>
          </table:table-cell>
          <table:table-cell table:formula="of:=NA()" office:value-type="string" office:string-value="" calcext:value-type="error">
            <text:p>#N/A</text:p>
          </table:table-cell>
          <table:table-cell table:formula="of:=IFERROR(VLOOKUP([.$Q19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98];[$特性番号.$A$1:$特性番号.$B$8];2;0);0)" office:value-type="float" office:value="0" calcext:value-type="float">
            <text:p>0</text:p>
          </table:table-cell>
          <table:table-cell office:value-type="string" calcext:value-type="string">
            <text:p>マリョク配置権+1する。</text:p>
          </table:table-cell>
          <table:table-cell table:style-name="ce8" office:value-type="string" calcext:value-type="string">
            <text:p>手札に戻す</text:p>
          </table:table-cell>
          <table:table-cell table:formula="of:=IFERROR(VLOOKUP([.$V198];[$遺業能力番号.$A$1:$遺業能力番号.$B$9];2;0);0)" office:value-type="float" office:value="5" calcext:value-type="float">
            <text:p>5</text:p>
          </table:table-cell>
          <table:table-cell office:value-type="string" calcext:value-type="string">
            <text:p>https://one-draw.jp/ijinden/cardlist/002/card/02_065.png</text:p>
          </table:table-cell>
          <table:table-cell table:formula="of:=CONCATENATE([$JSON.$A$1];[.$C198];[$JSON.$B$1];[.$E198];[$JSON.$C$1];[.$F198];[$JSON.$D$1];IF(ISNA([.$S198]);&quot;null&quot;;&quot;&quot;&quot;&quot;&amp;[.$S198]&amp;&quot;&quot;&quot;&quot;);[$JSON.$E$1];[.$U198];[$JSON.$F$1];IF(ISNA([.$V198]);&quot;null&quot;;&quot;&quot;&quot;&quot;&amp;[.$V198]&amp;&quot;&quot;&quot;&quot;);[$JSON.$G$1];[.$X198];[$JSON.$H$1];[.$H198];[$JSON.$I$1];[.J198];[$JSON.$J$1];[.$L198];[$JSON.$K$1];[.$O198];[$JSON.$L$1];[.$N198];[$JSON.$M$1];[.$R198];[$JSON.$N$1];[.$T198];[$JSON.$O$1];[.$W198];[$JSON.$P$1];[.$A198];[$JSON.$Q$1];[.$B198];[$JSON.$R$1])" office:value-type="string" office:string-value="{&quot;id&quot;:&quot;2-65&quot;,&quot;name&quot;:&quot;チャージ&quot;,&quot;kana&quot;:&quot;ちゃーじ&quot;,&quot;traitText&quot;:null,&quot;ruleText&quot;:&quot;マリョク配置権+1する。&quot;,&quot;legacyText&quot;:&quot;手札に戻す&quot;,&quot;imageUrl&quot;:&quot;https://one-draw.jp/ijinden/cardlist/002/card/02_065.png&quot;,&quot;expansion&quot;:25,&quot;rarity&quot;:1,&quot;type&quot;:3,&quot;level&quot;:1,&quot;color&quot;:4,&quot;term&quot;:0,&quot;trait&quot;:0,&quot;legacy&quot;:5,&quot;orderTable&quot;:197,&quot;orderDeck&quot;:284}," calcext:value-type="string">
            <text:p>{"id":"2-65","name":"チャージ","kana":"ちゃーじ","traitText":null,"ruleText":"マリョク配置権+1する。","legacyText":"手札に戻す","imageUrl":"https://one-draw.jp/ijinden/cardlist/002/card/02_065.png","expansion":25,"rarity":1,"type":3,"level":1,"color":4,"term":0,"trait":0,"legacy":5,"orderTable":197,"orderDeck":284},</text:p>
          </table:table-cell>
          <table:table-cell table:number-columns-repeated="16347"/>
        </table:table-row>
        <table:table-row table:style-name="ro2">
          <table:table-cell office:value-type="float" office:value="198" calcext:value-type="float">
            <text:p>198</text:p>
          </table:table-cell>
          <table:table-cell office:value-type="float" office:value="330" calcext:value-type="float">
            <text:p>330</text:p>
          </table:table-cell>
          <table:table-cell office:value-type="string" calcext:value-type="string">
            <text:p>2-66</text:p>
          </table:table-cell>
          <table:table-cell office:value-type="float" office:value="66" calcext:value-type="float">
            <text:p>66</text:p>
          </table:table-cell>
          <table:table-cell office:value-type="string" calcext:value-type="string">
            <text:p>カタストロフィ</text:p>
          </table:table-cell>
          <table:table-cell office:value-type="string" calcext:value-type="string">
            <text:p>かたすとろふぃ</text:p>
          </table:table-cell>
          <table:table-cell office:value-type="string" calcext:value-type="string">
            <text:p>第２弾ブースターパック</text:p>
          </table:table-cell>
          <table:table-cell table:formula="of:=VLOOKUP([.G199];[$収録番号.$A$1:$収録番号.$B$9];2;0)" office:value-type="float" office:value="25" calcext:value-type="float">
            <text:p>25</text:p>
          </table:table-cell>
          <table:table-cell office:value-type="string" calcext:value-type="string">
            <text:p>N</text:p>
          </table:table-cell>
          <table:table-cell table:formula="of:=VLOOKUP([.I199];[$レアリティ番号.$A$1:$レアリティ番号.$B$4];2;0)" office:value-type="float" office:value="1" calcext:value-type="float">
            <text:p>1</text:p>
          </table:table-cell>
          <table:table-cell office:value-type="string" calcext:value-type="string">
            <text:p>マホウ</text:p>
          </table:table-cell>
          <table:table-cell table:formula="of:=VLOOKUP([.K199];[$種類番号.$A$1:$種類番号.$B$4];2;0)" office:value-type="float" office:value="3" calcext:value-type="float">
            <text:p>3</text:p>
          </table:table-cell>
          <table:table-cell office:value-type="string" calcext:value-type="string">
            <text:p>黄</text:p>
          </table:table-cell>
          <table:table-cell table:formula="of:=VLOOKUP([.M199];[$色番号.$A$1:$色番号.$B$10];2;0)" office:value-type="float" office:value="8" calcext:value-type="float">
            <text:p>8</text:p>
          </table:table-cell>
          <table:table-cell office:value-type="float" office:value="5" calcext:value-type="float">
            <text:p>5</text:p>
          </table:table-cell>
          <table:table-cell office:value-type="float" office:value="2" calcext:value-type="float">
            <text:p>2</text:p>
          </table:table-cell>
          <table:table-cell table:formula="of:=NA()" office:value-type="string" office:string-value="" calcext:value-type="error">
            <text:p>#N/A</text:p>
          </table:table-cell>
          <table:table-cell table:formula="of:=IFERROR(VLOOKUP([.$Q19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99];[$特性番号.$A$1:$特性番号.$B$8];2;0);0)" office:value-type="float" office:value="0" calcext:value-type="float">
            <text:p>0</text:p>
          </table:table-cell>
          <table:table-cell office:value-type="string" calcext:value-type="string">
            <text:p>自分の戦場のガーディアン1体を指定して発動できる。そのガーディアンを山札の下に戻して、イジンすべてを破壊する。</text:p>
          </table:table-cell>
          <table:table-cell table:style-name="ce8" office:value-type="string" calcext:value-type="string">
            <text:p>冥府発動</text:p>
          </table:table-cell>
          <table:table-cell table:formula="of:=IFERROR(VLOOKUP([.$V199];[$遺業能力番号.$A$1:$遺業能力番号.$B$9];2;0);0)" office:value-type="float" office:value="2" calcext:value-type="float">
            <text:p>2</text:p>
          </table:table-cell>
          <table:table-cell office:value-type="string" calcext:value-type="string">
            <text:p>https://one-draw.jp/ijinden/cardlist/002/card/02_066.png</text:p>
          </table:table-cell>
          <table:table-cell table:formula="of:=CONCATENATE([$JSON.$A$1];[.$C199];[$JSON.$B$1];[.$E199];[$JSON.$C$1];[.$F199];[$JSON.$D$1];IF(ISNA([.$S199]);&quot;null&quot;;&quot;&quot;&quot;&quot;&amp;[.$S199]&amp;&quot;&quot;&quot;&quot;);[$JSON.$E$1];[.$U199];[$JSON.$F$1];IF(ISNA([.$V199]);&quot;null&quot;;&quot;&quot;&quot;&quot;&amp;[.$V199]&amp;&quot;&quot;&quot;&quot;);[$JSON.$G$1];[.$X199];[$JSON.$H$1];[.$H199];[$JSON.$I$1];[.J199];[$JSON.$J$1];[.$L199];[$JSON.$K$1];[.$O199];[$JSON.$L$1];[.$N199];[$JSON.$M$1];[.$R199];[$JSON.$N$1];[.$T199];[$JSON.$O$1];[.$W199];[$JSON.$P$1];[.$A199];[$JSON.$Q$1];[.$B199];[$JSON.$R$1])" office:value-type="string" office:string-value="{&quot;id&quot;:&quot;2-66&quot;,&quot;name&quot;:&quot;カタストロフィ&quot;,&quot;kana&quot;:&quot;かたすとろふぃ&quot;,&quot;traitText&quot;:null,&quot;ruleText&quot;:&quot;自分の戦場のガーディアン1体を指定して発動できる。そのガーディアンを山札の下に戻して、イジンすべてを破壊する。&quot;,&quot;legacyText&quot;:&quot;冥府発動&quot;,&quot;imageUrl&quot;:&quot;https://one-draw.jp/ijinden/cardlist/002/card/02_066.png&quot;,&quot;expansion&quot;:25,&quot;rarity&quot;:1,&quot;type&quot;:3,&quot;level&quot;:5,&quot;color&quot;:8,&quot;term&quot;:0,&quot;trait&quot;:0,&quot;legacy&quot;:2,&quot;orderTable&quot;:198,&quot;orderDeck&quot;:330}," calcext:value-type="string">
            <text:p>{"id":"2-66","name":"カタストロフィ","kana":"かたすとろふぃ","traitText":null,"ruleText":"自分の戦場のガーディアン1体を指定して発動できる。そのガーディアンを山札の下に戻して、イジンすべてを破壊する。","legacyText":"冥府発動","imageUrl":"https://one-draw.jp/ijinden/cardlist/002/card/02_066.png","expansion":25,"rarity":1,"type":3,"level":5,"color":8,"term":0,"trait":0,"legacy":2,"orderTable":198,"orderDeck":330},</text:p>
          </table:table-cell>
          <table:table-cell table:number-columns-repeated="16347"/>
        </table:table-row>
        <table:table-row table:style-name="ro2">
          <table:table-cell office:value-type="float" office:value="199" calcext:value-type="float">
            <text:p>199</text:p>
          </table:table-cell>
          <table:table-cell office:value-type="float" office:value="313" calcext:value-type="float">
            <text:p>313</text:p>
          </table:table-cell>
          <table:table-cell office:value-type="string" calcext:value-type="string">
            <text:p>2-67</text:p>
          </table:table-cell>
          <table:table-cell office:value-type="float" office:value="67" calcext:value-type="float">
            <text:p>67</text:p>
          </table:table-cell>
          <table:table-cell office:value-type="string" calcext:value-type="string">
            <text:p>エクスキューション</text:p>
          </table:table-cell>
          <table:table-cell office:value-type="string" calcext:value-type="string">
            <text:p>えくすきゅーしょん</text:p>
          </table:table-cell>
          <table:table-cell office:value-type="string" calcext:value-type="string">
            <text:p>第２弾ブースターパック</text:p>
          </table:table-cell>
          <table:table-cell table:formula="of:=VLOOKUP([.G200];[$収録番号.$A$1:$収録番号.$B$9];2;0)" office:value-type="float" office:value="25" calcext:value-type="float">
            <text:p>25</text:p>
          </table:table-cell>
          <table:table-cell office:value-type="string" calcext:value-type="string">
            <text:p>R</text:p>
          </table:table-cell>
          <table:table-cell table:formula="of:=VLOOKUP([.I200];[$レアリティ番号.$A$1:$レアリティ番号.$B$4];2;0)" office:value-type="float" office:value="2" calcext:value-type="float">
            <text:p>2</text:p>
          </table:table-cell>
          <table:table-cell office:value-type="string" calcext:value-type="string">
            <text:p>マホウ</text:p>
          </table:table-cell>
          <table:table-cell table:formula="of:=VLOOKUP([.K200];[$種類番号.$A$1:$種類番号.$B$4];2;0)" office:value-type="float" office:value="3" calcext:value-type="float">
            <text:p>3</text:p>
          </table:table-cell>
          <table:table-cell office:value-type="string" calcext:value-type="string">
            <text:p>黄</text:p>
          </table:table-cell>
          <table:table-cell table:formula="of:=VLOOKUP([.M200];[$色番号.$A$1:$色番号.$B$10];2;0)"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20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00];[$特性番号.$A$1:$特性番号.$B$8];2;0);0)" office:value-type="float" office:value="0" calcext:value-type="float">
            <text:p>0</text:p>
          </table:table-cell>
          <table:table-cell office:value-type="string" calcext:value-type="string">
            <text:p>戦場のレベル4以下のイジン1体を指定して発動できる。そのイジンを破壊する。</text:p>
          </table:table-cell>
          <table:table-cell table:style-name="ce8" office:value-type="string" calcext:value-type="string">
            <text:p>冥府発動</text:p>
          </table:table-cell>
          <table:table-cell table:formula="of:=IFERROR(VLOOKUP([.$V200];[$遺業能力番号.$A$1:$遺業能力番号.$B$9];2;0);0)" office:value-type="float" office:value="2" calcext:value-type="float">
            <text:p>2</text:p>
          </table:table-cell>
          <table:table-cell office:value-type="string" calcext:value-type="string">
            <text:p>https://one-draw.jp/ijinden/cardlist/002/card/02_067.png</text:p>
          </table:table-cell>
          <table:table-cell table:formula="of:=CONCATENATE([$JSON.$A$1];[.$C200];[$JSON.$B$1];[.$E200];[$JSON.$C$1];[.$F200];[$JSON.$D$1];IF(ISNA([.$S200]);&quot;null&quot;;&quot;&quot;&quot;&quot;&amp;[.$S200]&amp;&quot;&quot;&quot;&quot;);[$JSON.$E$1];[.$U200];[$JSON.$F$1];IF(ISNA([.$V200]);&quot;null&quot;;&quot;&quot;&quot;&quot;&amp;[.$V200]&amp;&quot;&quot;&quot;&quot;);[$JSON.$G$1];[.$X200];[$JSON.$H$1];[.$H200];[$JSON.$I$1];[.J200];[$JSON.$J$1];[.$L200];[$JSON.$K$1];[.$O200];[$JSON.$L$1];[.$N200];[$JSON.$M$1];[.$R200];[$JSON.$N$1];[.$T200];[$JSON.$O$1];[.$W200];[$JSON.$P$1];[.$A200];[$JSON.$Q$1];[.$B200];[$JSON.$R$1])" office:value-type="string" office:string-value="{&quot;id&quot;:&quot;2-67&quot;,&quot;name&quot;:&quot;エクスキューション&quot;,&quot;kana&quot;:&quot;えくすきゅーしょん&quot;,&quot;traitText&quot;:null,&quot;ruleText&quot;:&quot;戦場のレベル4以下のイジン1体を指定して発動できる。そのイジンを破壊する。&quot;,&quot;legacyText&quot;:&quot;冥府発動&quot;,&quot;imageUrl&quot;:&quot;https://one-draw.jp/ijinden/cardlist/002/card/02_067.png&quot;,&quot;expansion&quot;:25,&quot;rarity&quot;:2,&quot;type&quot;:3,&quot;level&quot;:3,&quot;color&quot;:8,&quot;term&quot;:0,&quot;trait&quot;:0,&quot;legacy&quot;:2,&quot;orderTable&quot;:199,&quot;orderDeck&quot;:313}," calcext:value-type="string">
            <text:p>{"id":"2-67","name":"エクスキューション","kana":"えくすきゅーしょん","traitText":null,"ruleText":"戦場のレベル4以下のイジン1体を指定して発動できる。そのイジンを破壊する。","legacyText":"冥府発動","imageUrl":"https://one-draw.jp/ijinden/cardlist/002/card/02_067.png","expansion":25,"rarity":2,"type":3,"level":3,"color":8,"term":0,"trait":0,"legacy":2,"orderTable":199,"orderDeck":313},</text:p>
          </table:table-cell>
          <table:table-cell table:number-columns-repeated="16347"/>
        </table:table-row>
        <table:table-row table:style-name="ro2">
          <table:table-cell office:value-type="float" office:value="200" calcext:value-type="float">
            <text:p>200</text:p>
          </table:table-cell>
          <table:table-cell office:value-type="float" office:value="323" calcext:value-type="float">
            <text:p>323</text:p>
          </table:table-cell>
          <table:table-cell office:value-type="string" calcext:value-type="string">
            <text:p>2-68</text:p>
          </table:table-cell>
          <table:table-cell office:value-type="float" office:value="68" calcext:value-type="float">
            <text:p>68</text:p>
          </table:table-cell>
          <table:table-cell office:value-type="string" calcext:value-type="string">
            <text:p>メロウ</text:p>
          </table:table-cell>
          <table:table-cell office:value-type="string" calcext:value-type="string">
            <text:p>めろう</text:p>
          </table:table-cell>
          <table:table-cell office:value-type="string" calcext:value-type="string">
            <text:p>第２弾ブースターパック</text:p>
          </table:table-cell>
          <table:table-cell table:formula="of:=VLOOKUP([.G201];[$収録番号.$A$1:$収録番号.$B$9];2;0)" office:value-type="float" office:value="25" calcext:value-type="float">
            <text:p>25</text:p>
          </table:table-cell>
          <table:table-cell office:value-type="string" calcext:value-type="string">
            <text:p>N</text:p>
          </table:table-cell>
          <table:table-cell table:formula="of:=VLOOKUP([.I201];[$レアリティ番号.$A$1:$レアリティ番号.$B$4];2;0)" office:value-type="float" office:value="1" calcext:value-type="float">
            <text:p>1</text:p>
          </table:table-cell>
          <table:table-cell office:value-type="string" calcext:value-type="string">
            <text:p>マホウ</text:p>
          </table:table-cell>
          <table:table-cell table:formula="of:=VLOOKUP([.K201];[$種類番号.$A$1:$種類番号.$B$4];2;0)" office:value-type="float" office:value="3" calcext:value-type="float">
            <text:p>3</text:p>
          </table:table-cell>
          <table:table-cell office:value-type="string" calcext:value-type="string">
            <text:p>黄</text:p>
          </table:table-cell>
          <table:table-cell table:formula="of:=VLOOKUP([.M201];[$色番号.$A$1:$色番号.$B$10];2;0)" office:value-type="float" office:value="8" calcext:value-type="float">
            <text:p>8</text:p>
          </table:table-cell>
          <table:table-cell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20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01];[$特性番号.$A$1:$特性番号.$B$8];2;0);0)" office:value-type="float" office:value="0" calcext:value-type="float">
            <text:p>0</text:p>
          </table:table-cell>
          <table:table-cell office:value-type="string" calcext:value-type="string">
            <text:p>戦場のレベル7以下のカード1つを指定して発動できる。そのカードをガーディアンにする。</text:p>
          </table:table-cell>
          <table:table-cell table:style-name="ce8" office:value-type="string" calcext:value-type="string">
            <text:p>冥府発動</text:p>
          </table:table-cell>
          <table:table-cell table:formula="of:=IFERROR(VLOOKUP([.$V201];[$遺業能力番号.$A$1:$遺業能力番号.$B$9];2;0);0)" office:value-type="float" office:value="2" calcext:value-type="float">
            <text:p>2</text:p>
          </table:table-cell>
          <table:table-cell office:value-type="string" calcext:value-type="string">
            <text:p>https://one-draw.jp/ijinden/cardlist/002/card/02_068.png</text:p>
          </table:table-cell>
          <table:table-cell table:formula="of:=CONCATENATE([$JSON.$A$1];[.$C201];[$JSON.$B$1];[.$E201];[$JSON.$C$1];[.$F201];[$JSON.$D$1];IF(ISNA([.$S201]);&quot;null&quot;;&quot;&quot;&quot;&quot;&amp;[.$S201]&amp;&quot;&quot;&quot;&quot;);[$JSON.$E$1];[.$U201];[$JSON.$F$1];IF(ISNA([.$V201]);&quot;null&quot;;&quot;&quot;&quot;&quot;&amp;[.$V201]&amp;&quot;&quot;&quot;&quot;);[$JSON.$G$1];[.$X201];[$JSON.$H$1];[.$H201];[$JSON.$I$1];[.J201];[$JSON.$J$1];[.$L201];[$JSON.$K$1];[.$O201];[$JSON.$L$1];[.$N201];[$JSON.$M$1];[.$R201];[$JSON.$N$1];[.$T201];[$JSON.$O$1];[.$W201];[$JSON.$P$1];[.$A201];[$JSON.$Q$1];[.$B201];[$JSON.$R$1])" office:value-type="string" office:string-value="{&quot;id&quot;:&quot;2-68&quot;,&quot;name&quot;:&quot;メロウ&quot;,&quot;kana&quot;:&quot;めろう&quot;,&quot;traitText&quot;:null,&quot;ruleText&quot;:&quot;戦場のレベル7以下のカード1つを指定して発動できる。そのカードをガーディアンにする。&quot;,&quot;legacyText&quot;:&quot;冥府発動&quot;,&quot;imageUrl&quot;:&quot;https://one-draw.jp/ijinden/cardlist/002/card/02_068.png&quot;,&quot;expansion&quot;:25,&quot;rarity&quot;:1,&quot;type&quot;:3,&quot;level&quot;:4,&quot;color&quot;:8,&quot;term&quot;:0,&quot;trait&quot;:0,&quot;legacy&quot;:2,&quot;orderTable&quot;:200,&quot;orderDeck&quot;:323}," calcext:value-type="string">
            <text:p>{"id":"2-68","name":"メロウ","kana":"めろう","traitText":null,"ruleText":"戦場のレベル7以下のカード1つを指定して発動できる。そのカードをガーディアンにする。","legacyText":"冥府発動","imageUrl":"https://one-draw.jp/ijinden/cardlist/002/card/02_068.png","expansion":25,"rarity":1,"type":3,"level":4,"color":8,"term":0,"trait":0,"legacy":2,"orderTable":200,"orderDeck":323},</text:p>
          </table:table-cell>
          <table:table-cell table:number-columns-repeated="16347"/>
        </table:table-row>
        <table:table-row table:style-name="ro2">
          <table:table-cell office:value-type="float" office:value="201" calcext:value-type="float">
            <text:p>201</text:p>
          </table:table-cell>
          <table:table-cell office:value-type="float" office:value="314" calcext:value-type="float">
            <text:p>314</text:p>
          </table:table-cell>
          <table:table-cell office:value-type="string" calcext:value-type="string">
            <text:p>2-69</text:p>
          </table:table-cell>
          <table:table-cell office:value-type="float" office:value="69" calcext:value-type="float">
            <text:p>69</text:p>
          </table:table-cell>
          <table:table-cell office:value-type="string" calcext:value-type="string">
            <text:p>スカーレット</text:p>
          </table:table-cell>
          <table:table-cell office:value-type="string" calcext:value-type="string">
            <text:p>すかーれっと</text:p>
          </table:table-cell>
          <table:table-cell office:value-type="string" calcext:value-type="string">
            <text:p>第２弾ブースターパック</text:p>
          </table:table-cell>
          <table:table-cell table:formula="of:=VLOOKUP([.G202];[$収録番号.$A$1:$収録番号.$B$9];2;0)" office:value-type="float" office:value="25" calcext:value-type="float">
            <text:p>25</text:p>
          </table:table-cell>
          <table:table-cell office:value-type="string" calcext:value-type="string">
            <text:p>N</text:p>
          </table:table-cell>
          <table:table-cell table:formula="of:=VLOOKUP([.I202];[$レアリティ番号.$A$1:$レアリティ番号.$B$4];2;0)" office:value-type="float" office:value="1" calcext:value-type="float">
            <text:p>1</text:p>
          </table:table-cell>
          <table:table-cell office:value-type="string" calcext:value-type="string">
            <text:p>マホウ</text:p>
          </table:table-cell>
          <table:table-cell table:formula="of:=VLOOKUP([.K202];[$種類番号.$A$1:$種類番号.$B$4];2;0)" office:value-type="float" office:value="3" calcext:value-type="float">
            <text:p>3</text:p>
          </table:table-cell>
          <table:table-cell office:value-type="string" calcext:value-type="string">
            <text:p>黄</text:p>
          </table:table-cell>
          <table:table-cell table:formula="of:=VLOOKUP([.M202];[$色番号.$A$1:$色番号.$B$10];2;0)"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赤魔導</text:p>
          </table:table-cell>
          <table:table-cell table:formula="of:=IFERROR(VLOOKUP([.$Q202];[$能力語番号.$A$1:$能力語番号.$B$10];2;0);0)" office:value-type="float" office:value="48" calcext:value-type="float">
            <text:p>48</text:p>
          </table:table-cell>
          <table:table-cell table:formula="of:=NA()" office:value-type="string" office:string-value="" calcext:value-type="error">
            <text:p>#N/A</text:p>
          </table:table-cell>
          <table:table-cell table:formula="of:=IFERROR(VLOOKUP([.$S202];[$特性番号.$A$1:$特性番号.$B$8];2;0);0)" office:value-type="float" office:value="0" calcext:value-type="float">
            <text:p>0</text:p>
          </table:table-cell>
          <table:table-cell office:value-type="string" calcext:value-type="string">
            <text:p>自分の戦場にある色1つにつき1つまで、戦場のハイケイを指定して発動できる。それらのハイケイすべてを破壊する。¶赤魔導 - 赤のカードが自分の戦場か自分の魔力ゾーンにあるなら、これの能力によって破壊されたハイケイ1つにつき1ドローする。</text:p>
          </table:table-cell>
          <table:table-cell table:style-name="ce8" office:value-type="string" calcext:value-type="string">
            <text:p>冥府発動</text:p>
          </table:table-cell>
          <table:table-cell table:formula="of:=IFERROR(VLOOKUP([.$V202];[$遺業能力番号.$A$1:$遺業能力番号.$B$9];2;0);0)" office:value-type="float" office:value="2" calcext:value-type="float">
            <text:p>2</text:p>
          </table:table-cell>
          <table:table-cell office:value-type="string" calcext:value-type="string">
            <text:p>https://one-draw.jp/ijinden/cardlist/002/card/02_069.png</text:p>
          </table:table-cell>
          <table:table-cell table:formula="of:=CONCATENATE([$JSON.$A$1];[.$C202];[$JSON.$B$1];[.$E202];[$JSON.$C$1];[.$F202];[$JSON.$D$1];IF(ISNA([.$S202]);&quot;null&quot;;&quot;&quot;&quot;&quot;&amp;[.$S202]&amp;&quot;&quot;&quot;&quot;);[$JSON.$E$1];[.$U202];[$JSON.$F$1];IF(ISNA([.$V202]);&quot;null&quot;;&quot;&quot;&quot;&quot;&amp;[.$V202]&amp;&quot;&quot;&quot;&quot;);[$JSON.$G$1];[.$X202];[$JSON.$H$1];[.$H202];[$JSON.$I$1];[.J202];[$JSON.$J$1];[.$L202];[$JSON.$K$1];[.$O202];[$JSON.$L$1];[.$N202];[$JSON.$M$1];[.$R202];[$JSON.$N$1];[.$T202];[$JSON.$O$1];[.$W202];[$JSON.$P$1];[.$A202];[$JSON.$Q$1];[.$B202];[$JSON.$R$1])" office:value-type="string" office:string-value="{&quot;id&quot;:&quot;2-69&quot;,&quot;name&quot;:&quot;スカーレット&quot;,&quot;kana&quot;:&quot;すかーれっと&quot;,&quot;traitText&quot;:null,&quot;ruleText&quot;:&quot;自分の戦場にある色1つにつき1つまで、戦場のハイケイを指定して発動できる。それらのハイケイすべてを破壊する。¶赤魔導 - 赤のカードが自分の戦場か自分の魔力ゾーンにあるなら、これの能力によって破壊されたハイケイ1つにつき1ドローする。&quot;,&quot;legacyText&quot;:&quot;冥府発動&quot;,&quot;imageUrl&quot;:&quot;https://one-draw.jp/ijinden/cardlist/002/card/02_069.png&quot;,&quot;expansion&quot;:25,&quot;rarity&quot;:1,&quot;type&quot;:3,&quot;level&quot;:3,&quot;color&quot;:8,&quot;term&quot;:48,&quot;trait&quot;:0,&quot;legacy&quot;:2,&quot;orderTable&quot;:201,&quot;orderDeck&quot;:314}," calcext:value-type="string">
            <text:p>{"id":"2-69","name":"スカーレット","kana":"すかーれっと","traitText":null,"ruleText":"自分の戦場にある色1つにつき1つまで、戦場のハイケイを指定して発動できる。それらのハイケイすべてを破壊する。¶赤魔導 - 赤のカードが自分の戦場か自分の魔力ゾーンにあるなら、これの能力によって破壊されたハイケイ1つにつき1ドローする。","legacyText":"冥府発動","imageUrl":"https://one-draw.jp/ijinden/cardlist/002/card/02_069.png","expansion":25,"rarity":1,"type":3,"level":3,"color":8,"term":48,"trait":0,"legacy":2,"orderTable":201,"orderDeck":314},</text:p>
          </table:table-cell>
          <table:table-cell table:number-columns-repeated="16347"/>
        </table:table-row>
        <table:table-row table:style-name="ro2">
          <table:table-cell office:value-type="float" office:value="202" calcext:value-type="float">
            <text:p>202</text:p>
          </table:table-cell>
          <table:table-cell office:value-type="float" office:value="315" calcext:value-type="float">
            <text:p>315</text:p>
          </table:table-cell>
          <table:table-cell office:value-type="string" calcext:value-type="string">
            <text:p>2-70</text:p>
          </table:table-cell>
          <table:table-cell office:value-type="float" office:value="70" calcext:value-type="float">
            <text:p>70</text:p>
          </table:table-cell>
          <table:table-cell office:value-type="string" calcext:value-type="string">
            <text:p>ピーコック</text:p>
          </table:table-cell>
          <table:table-cell office:value-type="string" calcext:value-type="string">
            <text:p>ぴーこっく</text:p>
          </table:table-cell>
          <table:table-cell office:value-type="string" calcext:value-type="string">
            <text:p>第２弾ブースターパック</text:p>
          </table:table-cell>
          <table:table-cell table:formula="of:=VLOOKUP([.G203];[$収録番号.$A$1:$収録番号.$B$9];2;0)" office:value-type="float" office:value="25" calcext:value-type="float">
            <text:p>25</text:p>
          </table:table-cell>
          <table:table-cell office:value-type="string" calcext:value-type="string">
            <text:p>N</text:p>
          </table:table-cell>
          <table:table-cell table:formula="of:=VLOOKUP([.I203];[$レアリティ番号.$A$1:$レアリティ番号.$B$4];2;0)" office:value-type="float" office:value="1" calcext:value-type="float">
            <text:p>1</text:p>
          </table:table-cell>
          <table:table-cell office:value-type="string" calcext:value-type="string">
            <text:p>マホウ</text:p>
          </table:table-cell>
          <table:table-cell table:formula="of:=VLOOKUP([.K203];[$種類番号.$A$1:$種類番号.$B$4];2;0)" office:value-type="float" office:value="3" calcext:value-type="float">
            <text:p>3</text:p>
          </table:table-cell>
          <table:table-cell office:value-type="string" calcext:value-type="string">
            <text:p>黄</text:p>
          </table:table-cell>
          <table:table-cell table:formula="of:=VLOOKUP([.M203];[$色番号.$A$1:$色番号.$B$10];2;0)"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青魔導</text:p>
          </table:table-cell>
          <table:table-cell table:formula="of:=IFERROR(VLOOKUP([.$Q203];[$能力語番号.$A$1:$能力語番号.$B$10];2;0);0)" office:value-type="float" office:value="80" calcext:value-type="float">
            <text:p>80</text:p>
          </table:table-cell>
          <table:table-cell table:formula="of:=NA()" office:value-type="string" office:string-value="" calcext:value-type="error">
            <text:p>#N/A</text:p>
          </table:table-cell>
          <table:table-cell table:formula="of:=IFERROR(VLOOKUP([.$S203];[$特性番号.$A$1:$特性番号.$B$8];2;0);0)" office:value-type="float" office:value="0" calcext:value-type="float">
            <text:p>0</text:p>
          </table:table-cell>
          <table:table-cell office:value-type="string" calcext:value-type="string">
            <text:p>自分の戦場にある色1つにつき1つまで、戦場のイジンを指定して発動できる。それらのイジンすべてを寝かせる。¶青魔導 - 青のカードが自分の戦場か自分の魔力ゾーンにあるなら、このターンと次のターンの間、これの能力によって寝かされたイジンは起きない。</text:p>
          </table:table-cell>
          <table:table-cell table:style-name="ce8" office:value-type="string" calcext:value-type="string">
            <text:p>冥府発動</text:p>
          </table:table-cell>
          <table:table-cell table:formula="of:=IFERROR(VLOOKUP([.$V203];[$遺業能力番号.$A$1:$遺業能力番号.$B$9];2;0);0)" office:value-type="float" office:value="2" calcext:value-type="float">
            <text:p>2</text:p>
          </table:table-cell>
          <table:table-cell office:value-type="string" calcext:value-type="string">
            <text:p>https://one-draw.jp/ijinden/cardlist/002/card/02_070.png</text:p>
          </table:table-cell>
          <table:table-cell table:formula="of:=CONCATENATE([$JSON.$A$1];[.$C203];[$JSON.$B$1];[.$E203];[$JSON.$C$1];[.$F203];[$JSON.$D$1];IF(ISNA([.$S203]);&quot;null&quot;;&quot;&quot;&quot;&quot;&amp;[.$S203]&amp;&quot;&quot;&quot;&quot;);[$JSON.$E$1];[.$U203];[$JSON.$F$1];IF(ISNA([.$V203]);&quot;null&quot;;&quot;&quot;&quot;&quot;&amp;[.$V203]&amp;&quot;&quot;&quot;&quot;);[$JSON.$G$1];[.$X203];[$JSON.$H$1];[.$H203];[$JSON.$I$1];[.J203];[$JSON.$J$1];[.$L203];[$JSON.$K$1];[.$O203];[$JSON.$L$1];[.$N203];[$JSON.$M$1];[.$R203];[$JSON.$N$1];[.$T203];[$JSON.$O$1];[.$W203];[$JSON.$P$1];[.$A203];[$JSON.$Q$1];[.$B203];[$JSON.$R$1])" office:value-type="string" office:string-value="{&quot;id&quot;:&quot;2-70&quot;,&quot;name&quot;:&quot;ピーコック&quot;,&quot;kana&quot;:&quot;ぴーこっく&quot;,&quot;traitText&quot;:null,&quot;ruleText&quot;:&quot;自分の戦場にある色1つにつき1つまで、戦場のイジンを指定して発動できる。それらのイジンすべてを寝かせる。¶青魔導 - 青のカードが自分の戦場か自分の魔力ゾーンにあるなら、このターンと次のターンの間、これの能力によって寝かされたイジンは起きない。&quot;,&quot;legacyText&quot;:&quot;冥府発動&quot;,&quot;imageUrl&quot;:&quot;https://one-draw.jp/ijinden/cardlist/002/card/02_070.png&quot;,&quot;expansion&quot;:25,&quot;rarity&quot;:1,&quot;type&quot;:3,&quot;level&quot;:3,&quot;color&quot;:8,&quot;term&quot;:80,&quot;trait&quot;:0,&quot;legacy&quot;:2,&quot;orderTable&quot;:202,&quot;orderDeck&quot;:315}," calcext:value-type="string">
            <text:p>{"id":"2-70","name":"ピーコック","kana":"ぴーこっく","traitText":null,"ruleText":"自分の戦場にある色1つにつき1つまで、戦場のイジンを指定して発動できる。それらのイジンすべてを寝かせる。¶青魔導 - 青のカードが自分の戦場か自分の魔力ゾーンにあるなら、このターンと次のターンの間、これの能力によって寝かされたイジンは起きない。","legacyText":"冥府発動","imageUrl":"https://one-draw.jp/ijinden/cardlist/002/card/02_070.png","expansion":25,"rarity":1,"type":3,"level":3,"color":8,"term":80,"trait":0,"legacy":2,"orderTable":202,"orderDeck":315},</text:p>
          </table:table-cell>
          <table:table-cell table:number-columns-repeated="16347"/>
        </table:table-row>
        <table:table-row table:style-name="ro2">
          <table:table-cell office:value-type="float" office:value="203" calcext:value-type="float">
            <text:p>203</text:p>
          </table:table-cell>
          <table:table-cell office:value-type="float" office:value="316" calcext:value-type="float">
            <text:p>316</text:p>
          </table:table-cell>
          <table:table-cell office:value-type="string" calcext:value-type="string">
            <text:p>2-71</text:p>
          </table:table-cell>
          <table:table-cell office:value-type="float" office:value="71" calcext:value-type="float">
            <text:p>71</text:p>
          </table:table-cell>
          <table:table-cell office:value-type="string" calcext:value-type="string">
            <text:p>シャトルーズ</text:p>
          </table:table-cell>
          <table:table-cell office:value-type="string" calcext:value-type="string">
            <text:p>しゃとるーず</text:p>
          </table:table-cell>
          <table:table-cell office:value-type="string" calcext:value-type="string">
            <text:p>第２弾ブースターパック</text:p>
          </table:table-cell>
          <table:table-cell table:formula="of:=VLOOKUP([.G204];[$収録番号.$A$1:$収録番号.$B$9];2;0)" office:value-type="float" office:value="25" calcext:value-type="float">
            <text:p>25</text:p>
          </table:table-cell>
          <table:table-cell office:value-type="string" calcext:value-type="string">
            <text:p>N</text:p>
          </table:table-cell>
          <table:table-cell table:formula="of:=VLOOKUP([.I204];[$レアリティ番号.$A$1:$レアリティ番号.$B$4];2;0)" office:value-type="float" office:value="1" calcext:value-type="float">
            <text:p>1</text:p>
          </table:table-cell>
          <table:table-cell office:value-type="string" calcext:value-type="string">
            <text:p>マホウ</text:p>
          </table:table-cell>
          <table:table-cell table:formula="of:=VLOOKUP([.K204];[$種類番号.$A$1:$種類番号.$B$4];2;0)" office:value-type="float" office:value="3" calcext:value-type="float">
            <text:p>3</text:p>
          </table:table-cell>
          <table:table-cell office:value-type="string" calcext:value-type="string">
            <text:p>黄</text:p>
          </table:table-cell>
          <table:table-cell table:formula="of:=VLOOKUP([.M204];[$色番号.$A$1:$色番号.$B$10];2;0)"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緑魔導</text:p>
          </table:table-cell>
          <table:table-cell table:formula="of:=IFERROR(VLOOKUP([.$Q204];[$能力語番号.$A$1:$能力語番号.$B$10];2;0);0)" office:value-type="float" office:value="144" calcext:value-type="float">
            <text:p>144</text:p>
          </table:table-cell>
          <table:table-cell table:formula="of:=NA()" office:value-type="string" office:string-value="" calcext:value-type="error">
            <text:p>#N/A</text:p>
          </table:table-cell>
          <table:table-cell table:formula="of:=IFERROR(VLOOKUP([.$S204];[$特性番号.$A$1:$特性番号.$B$8];2;0);0)" office:value-type="float" office:value="0" calcext:value-type="float">
            <text:p>0</text:p>
          </table:table-cell>
          <table:table-cell office:value-type="string" calcext:value-type="string">
            <text:p>自分の戦場にある色1つにつき1つまで、墓地のマリョクを指定して発動できる。それらのマリョクすべてを手札に戻す。¶緑魔導 - これの能力によってマリョクが手札に戻される際、緑のカードが自分の戦場か自分の魔力ゾーンにあるなら、手札に戻されず、魔力ゾーンに置かれる。</text:p>
          </table:table-cell>
          <table:table-cell table:style-name="ce8" office:value-type="string" calcext:value-type="string">
            <text:p>冥府発動</text:p>
          </table:table-cell>
          <table:table-cell table:formula="of:=IFERROR(VLOOKUP([.$V204];[$遺業能力番号.$A$1:$遺業能力番号.$B$9];2;0);0)" office:value-type="float" office:value="2" calcext:value-type="float">
            <text:p>2</text:p>
          </table:table-cell>
          <table:table-cell office:value-type="string" calcext:value-type="string">
            <text:p>https://one-draw.jp/ijinden/cardlist/002/card/02_071.png</text:p>
          </table:table-cell>
          <table:table-cell table:formula="of:=CONCATENATE([$JSON.$A$1];[.$C204];[$JSON.$B$1];[.$E204];[$JSON.$C$1];[.$F204];[$JSON.$D$1];IF(ISNA([.$S204]);&quot;null&quot;;&quot;&quot;&quot;&quot;&amp;[.$S204]&amp;&quot;&quot;&quot;&quot;);[$JSON.$E$1];[.$U204];[$JSON.$F$1];IF(ISNA([.$V204]);&quot;null&quot;;&quot;&quot;&quot;&quot;&amp;[.$V204]&amp;&quot;&quot;&quot;&quot;);[$JSON.$G$1];[.$X204];[$JSON.$H$1];[.$H204];[$JSON.$I$1];[.J204];[$JSON.$J$1];[.$L204];[$JSON.$K$1];[.$O204];[$JSON.$L$1];[.$N204];[$JSON.$M$1];[.$R204];[$JSON.$N$1];[.$T204];[$JSON.$O$1];[.$W204];[$JSON.$P$1];[.$A204];[$JSON.$Q$1];[.$B204];[$JSON.$R$1])" office:value-type="string" office:string-value="{&quot;id&quot;:&quot;2-71&quot;,&quot;name&quot;:&quot;シャトルーズ&quot;,&quot;kana&quot;:&quot;しゃとるーず&quot;,&quot;traitText&quot;:null,&quot;ruleText&quot;:&quot;自分の戦場にある色1つにつき1つまで、墓地のマリョクを指定して発動できる。それらのマリョクすべてを手札に戻す。¶緑魔導 - これの能力によってマリョクが手札に戻される際、緑のカードが自分の戦場か自分の魔力ゾーンにあるなら、手札に戻されず、魔力ゾーンに置かれる。&quot;,&quot;legacyText&quot;:&quot;冥府発動&quot;,&quot;imageUrl&quot;:&quot;https://one-draw.jp/ijinden/cardlist/002/card/02_071.png&quot;,&quot;expansion&quot;:25,&quot;rarity&quot;:1,&quot;type&quot;:3,&quot;level&quot;:3,&quot;color&quot;:8,&quot;term&quot;:144,&quot;trait&quot;:0,&quot;legacy&quot;:2,&quot;orderTable&quot;:203,&quot;orderDeck&quot;:316}," calcext:value-type="string">
            <text:p>{"id":"2-71","name":"シャトルーズ","kana":"しゃとるーず","traitText":null,"ruleText":"自分の戦場にある色1つにつき1つまで、墓地のマリョクを指定して発動できる。それらのマリョクすべてを手札に戻す。¶緑魔導 - これの能力によってマリョクが手札に戻される際、緑のカードが自分の戦場か自分の魔力ゾーンにあるなら、手札に戻されず、魔力ゾーンに置かれる。","legacyText":"冥府発動","imageUrl":"https://one-draw.jp/ijinden/cardlist/002/card/02_071.png","expansion":25,"rarity":1,"type":3,"level":3,"color":8,"term":144,"trait":0,"legacy":2,"orderTable":203,"orderDeck":316},</text:p>
          </table:table-cell>
          <table:table-cell table:number-columns-repeated="16347"/>
        </table:table-row>
        <table:table-row table:style-name="ro2">
          <table:table-cell office:value-type="float" office:value="204" calcext:value-type="float">
            <text:p>204</text:p>
          </table:table-cell>
          <table:table-cell office:value-type="float" office:value="362" calcext:value-type="float">
            <text:p>362</text:p>
          </table:table-cell>
          <table:table-cell office:value-type="string" calcext:value-type="string">
            <text:p>2-72</text:p>
          </table:table-cell>
          <table:table-cell office:value-type="float" office:value="72" calcext:value-type="float">
            <text:p>72</text:p>
          </table:table-cell>
          <table:table-cell office:value-type="string" calcext:value-type="string">
            <text:p>サンドグラス</text:p>
          </table:table-cell>
          <table:table-cell office:value-type="string" calcext:value-type="string">
            <text:p>さんどぐらす</text:p>
          </table:table-cell>
          <table:table-cell office:value-type="string" calcext:value-type="string">
            <text:p>第２弾ブースターパック</text:p>
          </table:table-cell>
          <table:table-cell table:formula="of:=VLOOKUP([.G205];[$収録番号.$A$1:$収録番号.$B$9];2;0)" office:value-type="float" office:value="25" calcext:value-type="float">
            <text:p>25</text:p>
          </table:table-cell>
          <table:table-cell office:value-type="string" calcext:value-type="string">
            <text:p>N</text:p>
          </table:table-cell>
          <table:table-cell table:formula="of:=VLOOKUP([.I205];[$レアリティ番号.$A$1:$レアリティ番号.$B$4];2;0)" office:value-type="float" office:value="1" calcext:value-type="float">
            <text:p>1</text:p>
          </table:table-cell>
          <table:table-cell office:value-type="string" calcext:value-type="string">
            <text:p>マリョク</text:p>
          </table:table-cell>
          <table:table-cell table:formula="of:=VLOOKUP([.K205];[$種類番号.$A$1:$種類番号.$B$4];2;0)" office:value-type="float" office:value="4" calcext:value-type="float">
            <text:p>4</text:p>
          </table:table-cell>
          <table:table-cell office:value-type="string" calcext:value-type="string">
            <text:p>黄</text:p>
          </table:table-cell>
          <table:table-cell table:formula="of:=VLOOKUP([.M205];[$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0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05];[$特性番号.$A$1:$特性番号.$B$8];2;0);0)" office:value-type="float" office:value="0" calcext:value-type="float">
            <text:p>0</text:p>
          </table:table-cell>
          <table:table-cell office:value-type="string" calcext:value-type="string">
            <text:p>魔力ゾーンに置かれたとき、1ドローする。</text:p>
          </table:table-cell>
          <table:table-cell table:style-name="ce8" table:formula="of:=NA()" office:value-type="string" office:string-value="" calcext:value-type="error">
            <text:p>#N/A</text:p>
          </table:table-cell>
          <table:table-cell table:formula="of:=IFERROR(VLOOKUP([.$V205];[$遺業能力番号.$A$1:$遺業能力番号.$B$9];2;0);0)" office:value-type="float" office:value="0" calcext:value-type="float">
            <text:p>0</text:p>
          </table:table-cell>
          <table:table-cell office:value-type="string" calcext:value-type="string">
            <text:p>https://one-draw.jp/ijinden/cardlist/002/card/02_072.png</text:p>
          </table:table-cell>
          <table:table-cell table:formula="of:=CONCATENATE([$JSON.$A$1];[.$C205];[$JSON.$B$1];[.$E205];[$JSON.$C$1];[.$F205];[$JSON.$D$1];IF(ISNA([.$S205]);&quot;null&quot;;&quot;&quot;&quot;&quot;&amp;[.$S205]&amp;&quot;&quot;&quot;&quot;);[$JSON.$E$1];[.$U205];[$JSON.$F$1];IF(ISNA([.$V205]);&quot;null&quot;;&quot;&quot;&quot;&quot;&amp;[.$V205]&amp;&quot;&quot;&quot;&quot;);[$JSON.$G$1];[.$X205];[$JSON.$H$1];[.$H205];[$JSON.$I$1];[.J205];[$JSON.$J$1];[.$L205];[$JSON.$K$1];[.$O205];[$JSON.$L$1];[.$N205];[$JSON.$M$1];[.$R205];[$JSON.$N$1];[.$T205];[$JSON.$O$1];[.$W205];[$JSON.$P$1];[.$A205];[$JSON.$Q$1];[.$B205];[$JSON.$R$1])" office:value-type="string" office:string-value="{&quot;id&quot;:&quot;2-72&quot;,&quot;name&quot;:&quot;サンドグラス&quot;,&quot;kana&quot;:&quot;さんどぐらす&quot;,&quot;traitText&quot;:null,&quot;ruleText&quot;:&quot;魔力ゾーンに置かれたとき、1ドローする。&quot;,&quot;legacyText&quot;:null,&quot;imageUrl&quot;:&quot;https://one-draw.jp/ijinden/cardlist/002/card/02_072.png&quot;,&quot;expansion&quot;:25,&quot;rarity&quot;:1,&quot;type&quot;:4,&quot;level&quot;:1,&quot;color&quot;:8,&quot;term&quot;:0,&quot;trait&quot;:0,&quot;legacy&quot;:0,&quot;orderTable&quot;:204,&quot;orderDeck&quot;:362}," calcext:value-type="string">
            <text:p>{"id":"2-72","name":"サンドグラス","kana":"さんどぐらす","traitText":null,"ruleText":"魔力ゾーンに置かれたとき、1ドローする。","legacyText":null,"imageUrl":"https://one-draw.jp/ijinden/cardlist/002/card/02_072.png","expansion":25,"rarity":1,"type":4,"level":1,"color":8,"term":0,"trait":0,"legacy":0,"orderTable":204,"orderDeck":362},</text:p>
          </table:table-cell>
          <table:table-cell table:number-columns-repeated="16347"/>
        </table:table-row>
        <table:table-row table:style-name="ro2">
          <table:table-cell office:value-type="float" office:value="205" calcext:value-type="float">
            <text:p>205</text:p>
          </table:table-cell>
          <table:table-cell office:value-type="float" office:value="363" calcext:value-type="float">
            <text:p>363</text:p>
          </table:table-cell>
          <table:table-cell office:value-type="string" calcext:value-type="string">
            <text:p>2-73</text:p>
          </table:table-cell>
          <table:table-cell office:value-type="float" office:value="73" calcext:value-type="float">
            <text:p>73</text:p>
          </table:table-cell>
          <table:table-cell office:value-type="string" calcext:value-type="string">
            <text:p>シルククローク</text:p>
          </table:table-cell>
          <table:table-cell office:value-type="string" calcext:value-type="string">
            <text:p>しるくくろーく</text:p>
          </table:table-cell>
          <table:table-cell office:value-type="string" calcext:value-type="string">
            <text:p>第２弾ブースターパック</text:p>
          </table:table-cell>
          <table:table-cell table:formula="of:=VLOOKUP([.G206];[$収録番号.$A$1:$収録番号.$B$9];2;0)" office:value-type="float" office:value="25" calcext:value-type="float">
            <text:p>25</text:p>
          </table:table-cell>
          <table:table-cell office:value-type="string" calcext:value-type="string">
            <text:p>N</text:p>
          </table:table-cell>
          <table:table-cell table:formula="of:=VLOOKUP([.I206];[$レアリティ番号.$A$1:$レアリティ番号.$B$4];2;0)" office:value-type="float" office:value="1" calcext:value-type="float">
            <text:p>1</text:p>
          </table:table-cell>
          <table:table-cell office:value-type="string" calcext:value-type="string">
            <text:p>マリョク</text:p>
          </table:table-cell>
          <table:table-cell table:formula="of:=VLOOKUP([.K206];[$種類番号.$A$1:$種類番号.$B$4];2;0)" office:value-type="float" office:value="4" calcext:value-type="float">
            <text:p>4</text:p>
          </table:table-cell>
          <table:table-cell office:value-type="string" calcext:value-type="string">
            <text:p>黄</text:p>
          </table:table-cell>
          <table:table-cell table:formula="of:=VLOOKUP([.M206];[$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0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06];[$特性番号.$A$1:$特性番号.$B$8];2;0);0)" office:value-type="float" office:value="0" calcext:value-type="float">
            <text:p>0</text:p>
          </table:table-cell>
          <table:table-cell office:value-type="string" calcext:value-type="string">
            <text:p>イジン召喚によってイジンが自分の戦場に置かれる際、魔力ゾーンにあるこれを、そのイジンに装備させてもよい。¶装備 : 「色：黄」 これの色1つにつき「パワー+500」を得る。</text:p>
          </table:table-cell>
          <table:table-cell table:style-name="ce8" office:value-type="string" calcext:value-type="string">
            <text:p>復元</text:p>
          </table:table-cell>
          <table:table-cell table:formula="of:=IFERROR(VLOOKUP([.$V206];[$遺業能力番号.$A$1:$遺業能力番号.$B$9];2;0);0)" office:value-type="float" office:value="3" calcext:value-type="float">
            <text:p>3</text:p>
          </table:table-cell>
          <table:table-cell office:value-type="string" calcext:value-type="string">
            <text:p>https://one-draw.jp/ijinden/cardlist/002/card/02_073.png</text:p>
          </table:table-cell>
          <table:table-cell table:formula="of:=CONCATENATE([$JSON.$A$1];[.$C206];[$JSON.$B$1];[.$E206];[$JSON.$C$1];[.$F206];[$JSON.$D$1];IF(ISNA([.$S206]);&quot;null&quot;;&quot;&quot;&quot;&quot;&amp;[.$S206]&amp;&quot;&quot;&quot;&quot;);[$JSON.$E$1];[.$U206];[$JSON.$F$1];IF(ISNA([.$V206]);&quot;null&quot;;&quot;&quot;&quot;&quot;&amp;[.$V206]&amp;&quot;&quot;&quot;&quot;);[$JSON.$G$1];[.$X206];[$JSON.$H$1];[.$H206];[$JSON.$I$1];[.J206];[$JSON.$J$1];[.$L206];[$JSON.$K$1];[.$O206];[$JSON.$L$1];[.$N206];[$JSON.$M$1];[.$R206];[$JSON.$N$1];[.$T206];[$JSON.$O$1];[.$W206];[$JSON.$P$1];[.$A206];[$JSON.$Q$1];[.$B206];[$JSON.$R$1])" office:value-type="string" office:string-value="{&quot;id&quot;:&quot;2-73&quot;,&quot;name&quot;:&quot;シルククローク&quot;,&quot;kana&quot;:&quot;しるくくろーく&quot;,&quot;traitText&quot;:null,&quot;ruleText&quot;:&quot;イジン召喚によってイジンが自分の戦場に置かれる際、魔力ゾーンにあるこれを、そのイジンに装備させてもよい。¶装備 : 「色：黄」 これの色1つにつき「パワー+500」を得る。&quot;,&quot;legacyText&quot;:&quot;復元&quot;,&quot;imageUrl&quot;:&quot;https://one-draw.jp/ijinden/cardlist/002/card/02_073.png&quot;,&quot;expansion&quot;:25,&quot;rarity&quot;:1,&quot;type&quot;:4,&quot;level&quot;:1,&quot;color&quot;:8,&quot;term&quot;:0,&quot;trait&quot;:0,&quot;legacy&quot;:3,&quot;orderTable&quot;:205,&quot;orderDeck&quot;:363}," calcext:value-type="string">
            <text:p>{"id":"2-73","name":"シルククローク","kana":"しるくくろーく","traitText":null,"ruleText":"イジン召喚によってイジンが自分の戦場に置かれる際、魔力ゾーンにあるこれを、そのイジンに装備させてもよい。¶装備 : 「色：黄」 これの色1つにつき「パワー+500」を得る。","legacyText":"復元","imageUrl":"https://one-draw.jp/ijinden/cardlist/002/card/02_073.png","expansion":25,"rarity":1,"type":4,"level":1,"color":8,"term":0,"trait":0,"legacy":3,"orderTable":205,"orderDeck":363},</text:p>
          </table:table-cell>
          <table:table-cell table:number-columns-repeated="16347"/>
        </table:table-row>
        <table:table-row table:style-name="ro2">
          <table:table-cell office:value-type="float" office:value="206" calcext:value-type="float">
            <text:p>206</text:p>
          </table:table-cell>
          <table:table-cell office:value-type="float" office:value="382" calcext:value-type="float">
            <text:p>382</text:p>
          </table:table-cell>
          <table:table-cell office:value-type="string" calcext:value-type="string">
            <text:p>2-74</text:p>
          </table:table-cell>
          <table:table-cell office:value-type="float" office:value="74" calcext:value-type="float">
            <text:p>74</text:p>
          </table:table-cell>
          <table:table-cell office:value-type="string" calcext:value-type="string">
            <text:p>イエローオーブ</text:p>
          </table:table-cell>
          <table:table-cell office:value-type="string" calcext:value-type="string">
            <text:p>いえろーおーぶ</text:p>
          </table:table-cell>
          <table:table-cell office:value-type="string" calcext:value-type="string">
            <text:p>第２弾ブースターパック</text:p>
          </table:table-cell>
          <table:table-cell table:formula="of:=VLOOKUP([.G207];[$収録番号.$A$1:$収録番号.$B$9];2;0)" office:value-type="float" office:value="25" calcext:value-type="float">
            <text:p>25</text:p>
          </table:table-cell>
          <table:table-cell office:value-type="string" calcext:value-type="string">
            <text:p>R</text:p>
          </table:table-cell>
          <table:table-cell table:formula="of:=VLOOKUP([.I207];[$レアリティ番号.$A$1:$レアリティ番号.$B$4];2;0)" office:value-type="float" office:value="2" calcext:value-type="float">
            <text:p>2</text:p>
          </table:table-cell>
          <table:table-cell office:value-type="string" calcext:value-type="string">
            <text:p>マリョク</text:p>
          </table:table-cell>
          <table:table-cell table:formula="of:=VLOOKUP([.K207];[$種類番号.$A$1:$種類番号.$B$4];2;0)" office:value-type="float" office:value="4" calcext:value-type="float">
            <text:p>4</text:p>
          </table:table-cell>
          <table:table-cell office:value-type="string" calcext:value-type="string">
            <text:p>黄</text:p>
          </table:table-cell>
          <table:table-cell table:formula="of:=VLOOKUP([.M207];[$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0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07];[$特性番号.$A$1:$特性番号.$B$8];2;0);0)" office:value-type="float" office:value="0" calcext:value-type="float">
            <text:p>0</text:p>
          </table:table-cell>
          <table:table-cell/>
          <table:table-cell table:style-name="ce8" office:value-type="string" calcext:value-type="string">
            <text:p>復元</text:p>
          </table:table-cell>
          <table:table-cell table:formula="of:=IFERROR(VLOOKUP([.$V207];[$遺業能力番号.$A$1:$遺業能力番号.$B$9];2;0);0)" office:value-type="float" office:value="3" calcext:value-type="float">
            <text:p>3</text:p>
          </table:table-cell>
          <table:table-cell office:value-type="string" calcext:value-type="string">
            <text:p>https://one-draw.jp/ijinden/cardlist/002/card/02_074.png</text:p>
          </table:table-cell>
          <table:table-cell table:formula="of:=CONCATENATE([$JSON.$A$1];[.$C207];[$JSON.$B$1];[.$E207];[$JSON.$C$1];[.$F207];[$JSON.$D$1];IF(ISNA([.$S207]);&quot;null&quot;;&quot;&quot;&quot;&quot;&amp;[.$S207]&amp;&quot;&quot;&quot;&quot;);[$JSON.$E$1];[.$U207];[$JSON.$F$1];IF(ISNA([.$V207]);&quot;null&quot;;&quot;&quot;&quot;&quot;&amp;[.$V207]&amp;&quot;&quot;&quot;&quot;);[$JSON.$G$1];[.$X207];[$JSON.$H$1];[.$H207];[$JSON.$I$1];[.J207];[$JSON.$J$1];[.$L207];[$JSON.$K$1];[.$O207];[$JSON.$L$1];[.$N207];[$JSON.$M$1];[.$R207];[$JSON.$N$1];[.$T207];[$JSON.$O$1];[.$W207];[$JSON.$P$1];[.$A207];[$JSON.$Q$1];[.$B207];[$JSON.$R$1])" office:value-type="string" office:string-value="{&quot;id&quot;:&quot;2-74&quot;,&quot;name&quot;:&quot;イエローオーブ&quot;,&quot;kana&quot;:&quot;いえろーおーぶ&quot;,&quot;traitText&quot;:null,&quot;ruleText&quot;:&quot;&quot;,&quot;legacyText&quot;:&quot;復元&quot;,&quot;imageUrl&quot;:&quot;https://one-draw.jp/ijinden/cardlist/002/card/02_074.png&quot;,&quot;expansion&quot;:25,&quot;rarity&quot;:2,&quot;type&quot;:4,&quot;level&quot;:2,&quot;color&quot;:8,&quot;term&quot;:0,&quot;trait&quot;:0,&quot;legacy&quot;:3,&quot;orderTable&quot;:206,&quot;orderDeck&quot;:382}," calcext:value-type="string">
            <text:p>{"id":"2-74","name":"イエローオーブ","kana":"いえろーおーぶ","traitText":null,"ruleText":"","legacyText":"復元","imageUrl":"https://one-draw.jp/ijinden/cardlist/002/card/02_074.png","expansion":25,"rarity":2,"type":4,"level":2,"color":8,"term":0,"trait":0,"legacy":3,"orderTable":206,"orderDeck":382},</text:p>
          </table:table-cell>
          <table:table-cell table:number-columns-repeated="16347"/>
        </table:table-row>
        <table:table-row table:style-name="ro2">
          <table:table-cell office:value-type="float" office:value="207" calcext:value-type="float">
            <text:p>207</text:p>
          </table:table-cell>
          <table:table-cell office:value-type="float" office:value="372" calcext:value-type="float">
            <text:p>372</text:p>
          </table:table-cell>
          <table:table-cell office:value-type="string" calcext:value-type="string">
            <text:p>2-75</text:p>
          </table:table-cell>
          <table:table-cell office:value-type="float" office:value="75" calcext:value-type="float">
            <text:p>75</text:p>
          </table:table-cell>
          <table:table-cell office:value-type="string" calcext:value-type="string">
            <text:p>RYマーブルストーン</text:p>
          </table:table-cell>
          <table:table-cell office:value-type="string" calcext:value-type="string">
            <text:p>ryまーぶるすとーん</text:p>
          </table:table-cell>
          <table:table-cell office:value-type="string" calcext:value-type="string">
            <text:p>第２弾ブースターパック</text:p>
          </table:table-cell>
          <table:table-cell table:formula="of:=VLOOKUP([.G208];[$収録番号.$A$1:$収録番号.$B$9];2;0)" office:value-type="float" office:value="25" calcext:value-type="float">
            <text:p>25</text:p>
          </table:table-cell>
          <table:table-cell office:value-type="string" calcext:value-type="string">
            <text:p>N</text:p>
          </table:table-cell>
          <table:table-cell table:formula="of:=VLOOKUP([.I208];[$レアリティ番号.$A$1:$レアリティ番号.$B$4];2;0)" office:value-type="float" office:value="1" calcext:value-type="float">
            <text:p>1</text:p>
          </table:table-cell>
          <table:table-cell office:value-type="string" calcext:value-type="string">
            <text:p>マリョク</text:p>
          </table:table-cell>
          <table:table-cell table:formula="of:=VLOOKUP([.K208];[$種類番号.$A$1:$種類番号.$B$4];2;0)" office:value-type="float" office:value="4" calcext:value-type="float">
            <text:p>4</text:p>
          </table:table-cell>
          <table:table-cell office:value-type="string" calcext:value-type="string">
            <text:p>赤黄</text:p>
          </table:table-cell>
          <table:table-cell table:formula="of:=VLOOKUP([.M208];[$色番号.$A$1:$色番号.$B$10];2;0)" office:value-type="float" office:value="41" calcext:value-type="float">
            <text:p>4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0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08];[$特性番号.$A$1:$特性番号.$B$8];2;0);0)" office:value-type="float" office:value="0" calcext:value-type="float">
            <text:p>0</text:p>
          </table:table-cell>
          <table:table-cell/>
          <table:table-cell table:style-name="ce8" office:value-type="string" calcext:value-type="string">
            <text:p>復元</text:p>
          </table:table-cell>
          <table:table-cell table:formula="of:=IFERROR(VLOOKUP([.$V208];[$遺業能力番号.$A$1:$遺業能力番号.$B$9];2;0);0)" office:value-type="float" office:value="3" calcext:value-type="float">
            <text:p>3</text:p>
          </table:table-cell>
          <table:table-cell office:value-type="string" calcext:value-type="string">
            <text:p>https://one-draw.jp/ijinden/cardlist/002/card/02_075.png</text:p>
          </table:table-cell>
          <table:table-cell table:formula="of:=CONCATENATE([$JSON.$A$1];[.$C208];[$JSON.$B$1];[.$E208];[$JSON.$C$1];[.$F208];[$JSON.$D$1];IF(ISNA([.$S208]);&quot;null&quot;;&quot;&quot;&quot;&quot;&amp;[.$S208]&amp;&quot;&quot;&quot;&quot;);[$JSON.$E$1];[.$U208];[$JSON.$F$1];IF(ISNA([.$V208]);&quot;null&quot;;&quot;&quot;&quot;&quot;&amp;[.$V208]&amp;&quot;&quot;&quot;&quot;);[$JSON.$G$1];[.$X208];[$JSON.$H$1];[.$H208];[$JSON.$I$1];[.J208];[$JSON.$J$1];[.$L208];[$JSON.$K$1];[.$O208];[$JSON.$L$1];[.$N208];[$JSON.$M$1];[.$R208];[$JSON.$N$1];[.$T208];[$JSON.$O$1];[.$W208];[$JSON.$P$1];[.$A208];[$JSON.$Q$1];[.$B208];[$JSON.$R$1])" office:value-type="string" office:string-value="{&quot;id&quot;:&quot;2-75&quot;,&quot;name&quot;:&quot;RYマーブルストーン&quot;,&quot;kana&quot;:&quot;ryまーぶるすとーん&quot;,&quot;traitText&quot;:null,&quot;ruleText&quot;:&quot;&quot;,&quot;legacyText&quot;:&quot;復元&quot;,&quot;imageUrl&quot;:&quot;https://one-draw.jp/ijinden/cardlist/002/card/02_075.png&quot;,&quot;expansion&quot;:25,&quot;rarity&quot;:1,&quot;type&quot;:4,&quot;level&quot;:1,&quot;color&quot;:41,&quot;term&quot;:0,&quot;trait&quot;:0,&quot;legacy&quot;:3,&quot;orderTable&quot;:207,&quot;orderDeck&quot;:372}," calcext:value-type="string">
            <text:p>{"id":"2-75","name":"RYマーブルストーン","kana":"ryまーぶるすとーん","traitText":null,"ruleText":"","legacyText":"復元","imageUrl":"https://one-draw.jp/ijinden/cardlist/002/card/02_075.png","expansion":25,"rarity":1,"type":4,"level":1,"color":41,"term":0,"trait":0,"legacy":3,"orderTable":207,"orderDeck":372},</text:p>
          </table:table-cell>
          <table:table-cell table:number-columns-repeated="16347"/>
        </table:table-row>
        <table:table-row table:style-name="ro2">
          <table:table-cell office:value-type="float" office:value="208" calcext:value-type="float">
            <text:p>208</text:p>
          </table:table-cell>
          <table:table-cell office:value-type="float" office:value="373" calcext:value-type="float">
            <text:p>373</text:p>
          </table:table-cell>
          <table:table-cell office:value-type="string" calcext:value-type="string">
            <text:p>2-76</text:p>
          </table:table-cell>
          <table:table-cell office:value-type="float" office:value="76" calcext:value-type="float">
            <text:p>76</text:p>
          </table:table-cell>
          <table:table-cell office:value-type="string" calcext:value-type="string">
            <text:p>BYマーブルストーン</text:p>
          </table:table-cell>
          <table:table-cell office:value-type="string" calcext:value-type="string">
            <text:p>byまーぶるすとーん</text:p>
          </table:table-cell>
          <table:table-cell office:value-type="string" calcext:value-type="string">
            <text:p>第２弾ブースターパック</text:p>
          </table:table-cell>
          <table:table-cell table:formula="of:=VLOOKUP([.G209];[$収録番号.$A$1:$収録番号.$B$9];2;0)" office:value-type="float" office:value="25" calcext:value-type="float">
            <text:p>25</text:p>
          </table:table-cell>
          <table:table-cell office:value-type="string" calcext:value-type="string">
            <text:p>N</text:p>
          </table:table-cell>
          <table:table-cell table:formula="of:=VLOOKUP([.I209];[$レアリティ番号.$A$1:$レアリティ番号.$B$4];2;0)" office:value-type="float" office:value="1" calcext:value-type="float">
            <text:p>1</text:p>
          </table:table-cell>
          <table:table-cell office:value-type="string" calcext:value-type="string">
            <text:p>マリョク</text:p>
          </table:table-cell>
          <table:table-cell table:formula="of:=VLOOKUP([.K209];[$種類番号.$A$1:$種類番号.$B$4];2;0)" office:value-type="float" office:value="4" calcext:value-type="float">
            <text:p>4</text:p>
          </table:table-cell>
          <table:table-cell office:value-type="string" calcext:value-type="string">
            <text:p>青黄</text:p>
          </table:table-cell>
          <table:table-cell table:formula="of:=VLOOKUP([.M209];[$色番号.$A$1:$色番号.$B$10];2;0)" office:value-type="float" office:value="42" calcext:value-type="float">
            <text:p>4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0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09];[$特性番号.$A$1:$特性番号.$B$8];2;0);0)" office:value-type="float" office:value="0" calcext:value-type="float">
            <text:p>0</text:p>
          </table:table-cell>
          <table:table-cell/>
          <table:table-cell table:style-name="ce8" office:value-type="string" calcext:value-type="string">
            <text:p>復元</text:p>
          </table:table-cell>
          <table:table-cell table:formula="of:=IFERROR(VLOOKUP([.$V209];[$遺業能力番号.$A$1:$遺業能力番号.$B$9];2;0);0)" office:value-type="float" office:value="3" calcext:value-type="float">
            <text:p>3</text:p>
          </table:table-cell>
          <table:table-cell office:value-type="string" calcext:value-type="string">
            <text:p>https://one-draw.jp/ijinden/cardlist/002/card/02_076.png</text:p>
          </table:table-cell>
          <table:table-cell table:formula="of:=CONCATENATE([$JSON.$A$1];[.$C209];[$JSON.$B$1];[.$E209];[$JSON.$C$1];[.$F209];[$JSON.$D$1];IF(ISNA([.$S209]);&quot;null&quot;;&quot;&quot;&quot;&quot;&amp;[.$S209]&amp;&quot;&quot;&quot;&quot;);[$JSON.$E$1];[.$U209];[$JSON.$F$1];IF(ISNA([.$V209]);&quot;null&quot;;&quot;&quot;&quot;&quot;&amp;[.$V209]&amp;&quot;&quot;&quot;&quot;);[$JSON.$G$1];[.$X209];[$JSON.$H$1];[.$H209];[$JSON.$I$1];[.J209];[$JSON.$J$1];[.$L209];[$JSON.$K$1];[.$O209];[$JSON.$L$1];[.$N209];[$JSON.$M$1];[.$R209];[$JSON.$N$1];[.$T209];[$JSON.$O$1];[.$W209];[$JSON.$P$1];[.$A209];[$JSON.$Q$1];[.$B209];[$JSON.$R$1])" office:value-type="string" office:string-value="{&quot;id&quot;:&quot;2-76&quot;,&quot;name&quot;:&quot;BYマーブルストーン&quot;,&quot;kana&quot;:&quot;byまーぶるすとーん&quot;,&quot;traitText&quot;:null,&quot;ruleText&quot;:&quot;&quot;,&quot;legacyText&quot;:&quot;復元&quot;,&quot;imageUrl&quot;:&quot;https://one-draw.jp/ijinden/cardlist/002/card/02_076.png&quot;,&quot;expansion&quot;:25,&quot;rarity&quot;:1,&quot;type&quot;:4,&quot;level&quot;:1,&quot;color&quot;:42,&quot;term&quot;:0,&quot;trait&quot;:0,&quot;legacy&quot;:3,&quot;orderTable&quot;:208,&quot;orderDeck&quot;:373}," calcext:value-type="string">
            <text:p>{"id":"2-76","name":"BYマーブルストーン","kana":"byまーぶるすとーん","traitText":null,"ruleText":"","legacyText":"復元","imageUrl":"https://one-draw.jp/ijinden/cardlist/002/card/02_076.png","expansion":25,"rarity":1,"type":4,"level":1,"color":42,"term":0,"trait":0,"legacy":3,"orderTable":208,"orderDeck":373},</text:p>
          </table:table-cell>
          <table:table-cell table:number-columns-repeated="16347"/>
        </table:table-row>
        <table:table-row table:style-name="ro2">
          <table:table-cell office:value-type="float" office:value="209" calcext:value-type="float">
            <text:p>209</text:p>
          </table:table-cell>
          <table:table-cell office:value-type="float" office:value="374" calcext:value-type="float">
            <text:p>374</text:p>
          </table:table-cell>
          <table:table-cell office:value-type="string" calcext:value-type="string">
            <text:p>2-77</text:p>
          </table:table-cell>
          <table:table-cell office:value-type="float" office:value="77" calcext:value-type="float">
            <text:p>77</text:p>
          </table:table-cell>
          <table:table-cell office:value-type="string" calcext:value-type="string">
            <text:p>GYマーブルストーン</text:p>
          </table:table-cell>
          <table:table-cell office:value-type="string" calcext:value-type="string">
            <text:p>gyまーぶるすとーん</text:p>
          </table:table-cell>
          <table:table-cell office:value-type="string" calcext:value-type="string">
            <text:p>第２弾ブースターパック</text:p>
          </table:table-cell>
          <table:table-cell table:formula="of:=VLOOKUP([.G210];[$収録番号.$A$1:$収録番号.$B$9];2;0)" office:value-type="float" office:value="25" calcext:value-type="float">
            <text:p>25</text:p>
          </table:table-cell>
          <table:table-cell office:value-type="string" calcext:value-type="string">
            <text:p>N</text:p>
          </table:table-cell>
          <table:table-cell table:formula="of:=VLOOKUP([.I210];[$レアリティ番号.$A$1:$レアリティ番号.$B$4];2;0)" office:value-type="float" office:value="1" calcext:value-type="float">
            <text:p>1</text:p>
          </table:table-cell>
          <table:table-cell office:value-type="string" calcext:value-type="string">
            <text:p>マリョク</text:p>
          </table:table-cell>
          <table:table-cell table:formula="of:=VLOOKUP([.K210];[$種類番号.$A$1:$種類番号.$B$4];2;0)" office:value-type="float" office:value="4" calcext:value-type="float">
            <text:p>4</text:p>
          </table:table-cell>
          <table:table-cell office:value-type="string" calcext:value-type="string">
            <text:p>緑黄</text:p>
          </table:table-cell>
          <table:table-cell table:formula="of:=VLOOKUP([.M210];[$色番号.$A$1:$色番号.$B$10];2;0)" office:value-type="float" office:value="44" calcext:value-type="float">
            <text:p>4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1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10];[$特性番号.$A$1:$特性番号.$B$8];2;0);0)" office:value-type="float" office:value="0" calcext:value-type="float">
            <text:p>0</text:p>
          </table:table-cell>
          <table:table-cell/>
          <table:table-cell table:style-name="ce8" office:value-type="string" calcext:value-type="string">
            <text:p>復元</text:p>
          </table:table-cell>
          <table:table-cell table:formula="of:=IFERROR(VLOOKUP([.$V210];[$遺業能力番号.$A$1:$遺業能力番号.$B$9];2;0);0)" office:value-type="float" office:value="3" calcext:value-type="float">
            <text:p>3</text:p>
          </table:table-cell>
          <table:table-cell office:value-type="string" calcext:value-type="string">
            <text:p>https://one-draw.jp/ijinden/cardlist/002/card/02_077.png</text:p>
          </table:table-cell>
          <table:table-cell table:formula="of:=CONCATENATE([$JSON.$A$1];[.$C210];[$JSON.$B$1];[.$E210];[$JSON.$C$1];[.$F210];[$JSON.$D$1];IF(ISNA([.$S210]);&quot;null&quot;;&quot;&quot;&quot;&quot;&amp;[.$S210]&amp;&quot;&quot;&quot;&quot;);[$JSON.$E$1];[.$U210];[$JSON.$F$1];IF(ISNA([.$V210]);&quot;null&quot;;&quot;&quot;&quot;&quot;&amp;[.$V210]&amp;&quot;&quot;&quot;&quot;);[$JSON.$G$1];[.$X210];[$JSON.$H$1];[.$H210];[$JSON.$I$1];[.J210];[$JSON.$J$1];[.$L210];[$JSON.$K$1];[.$O210];[$JSON.$L$1];[.$N210];[$JSON.$M$1];[.$R210];[$JSON.$N$1];[.$T210];[$JSON.$O$1];[.$W210];[$JSON.$P$1];[.$A210];[$JSON.$Q$1];[.$B210];[$JSON.$R$1])" office:value-type="string" office:string-value="{&quot;id&quot;:&quot;2-77&quot;,&quot;name&quot;:&quot;GYマーブルストーン&quot;,&quot;kana&quot;:&quot;gyまーぶるすとーん&quot;,&quot;traitText&quot;:null,&quot;ruleText&quot;:&quot;&quot;,&quot;legacyText&quot;:&quot;復元&quot;,&quot;imageUrl&quot;:&quot;https://one-draw.jp/ijinden/cardlist/002/card/02_077.png&quot;,&quot;expansion&quot;:25,&quot;rarity&quot;:1,&quot;type&quot;:4,&quot;level&quot;:1,&quot;color&quot;:44,&quot;term&quot;:0,&quot;trait&quot;:0,&quot;legacy&quot;:3,&quot;orderTable&quot;:209,&quot;orderDeck&quot;:374}," calcext:value-type="string">
            <text:p>{"id":"2-77","name":"GYマーブルストーン","kana":"gyまーぶるすとーん","traitText":null,"ruleText":"","legacyText":"復元","imageUrl":"https://one-draw.jp/ijinden/cardlist/002/card/02_077.png","expansion":25,"rarity":1,"type":4,"level":1,"color":44,"term":0,"trait":0,"legacy":3,"orderTable":209,"orderDeck":374},</text:p>
          </table:table-cell>
          <table:table-cell table:number-columns-repeated="16347"/>
        </table:table-row>
        <table:table-row table:style-name="ro2">
          <table:table-cell office:value-type="float" office:value="210" calcext:value-type="float">
            <text:p>210</text:p>
          </table:table-cell>
          <table:table-cell office:value-type="float" office:value="384" calcext:value-type="float">
            <text:p>384</text:p>
          </table:table-cell>
          <table:table-cell office:value-type="string" calcext:value-type="string">
            <text:p>2-78</text:p>
          </table:table-cell>
          <table:table-cell office:value-type="float" office:value="78" calcext:value-type="float">
            <text:p>78</text:p>
          </table:table-cell>
          <table:table-cell office:value-type="string" calcext:value-type="string">
            <text:p>RYマーブルオーブ</text:p>
          </table:table-cell>
          <table:table-cell office:value-type="string" calcext:value-type="string">
            <text:p>ryまーぶるおーぶ</text:p>
          </table:table-cell>
          <table:table-cell office:value-type="string" calcext:value-type="string">
            <text:p>第２弾ブースターパック</text:p>
          </table:table-cell>
          <table:table-cell table:formula="of:=VLOOKUP([.G211];[$収録番号.$A$1:$収録番号.$B$9];2;0)" office:value-type="float" office:value="25" calcext:value-type="float">
            <text:p>25</text:p>
          </table:table-cell>
          <table:table-cell office:value-type="string" calcext:value-type="string">
            <text:p>R</text:p>
          </table:table-cell>
          <table:table-cell table:formula="of:=VLOOKUP([.I211];[$レアリティ番号.$A$1:$レアリティ番号.$B$4];2;0)" office:value-type="float" office:value="2" calcext:value-type="float">
            <text:p>2</text:p>
          </table:table-cell>
          <table:table-cell office:value-type="string" calcext:value-type="string">
            <text:p>マリョク</text:p>
          </table:table-cell>
          <table:table-cell table:formula="of:=VLOOKUP([.K211];[$種類番号.$A$1:$種類番号.$B$4];2;0)" office:value-type="float" office:value="4" calcext:value-type="float">
            <text:p>4</text:p>
          </table:table-cell>
          <table:table-cell office:value-type="string" calcext:value-type="string">
            <text:p>赤黄</text:p>
          </table:table-cell>
          <table:table-cell table:formula="of:=VLOOKUP([.M211];[$色番号.$A$1:$色番号.$B$10];2;0)" office:value-type="float" office:value="41" calcext:value-type="float">
            <text:p>4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1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11];[$特性番号.$A$1:$特性番号.$B$8];2;0);0)" office:value-type="float" office:value="0" calcext:value-type="float">
            <text:p>0</text:p>
          </table:table-cell>
          <table:table-cell office:value-type="string" calcext:value-type="string">
            <text:p>魔力ゾーンに置かれたとき、赤か黄の他のマリョクが自分の魔力ゾーンにないなら、自分の戦場のガーディアン1体を山札の上に戻す。</text:p>
          </table:table-cell>
          <table:table-cell table:style-name="ce8" office:value-type="string" calcext:value-type="string">
            <text:p>復元</text:p>
          </table:table-cell>
          <table:table-cell table:formula="of:=IFERROR(VLOOKUP([.$V211];[$遺業能力番号.$A$1:$遺業能力番号.$B$9];2;0);0)" office:value-type="float" office:value="3" calcext:value-type="float">
            <text:p>3</text:p>
          </table:table-cell>
          <table:table-cell office:value-type="string" calcext:value-type="string">
            <text:p>https://one-draw.jp/ijinden/cardlist/002/card/02_078.png</text:p>
          </table:table-cell>
          <table:table-cell table:formula="of:=CONCATENATE([$JSON.$A$1];[.$C211];[$JSON.$B$1];[.$E211];[$JSON.$C$1];[.$F211];[$JSON.$D$1];IF(ISNA([.$S211]);&quot;null&quot;;&quot;&quot;&quot;&quot;&amp;[.$S211]&amp;&quot;&quot;&quot;&quot;);[$JSON.$E$1];[.$U211];[$JSON.$F$1];IF(ISNA([.$V211]);&quot;null&quot;;&quot;&quot;&quot;&quot;&amp;[.$V211]&amp;&quot;&quot;&quot;&quot;);[$JSON.$G$1];[.$X211];[$JSON.$H$1];[.$H211];[$JSON.$I$1];[.J211];[$JSON.$J$1];[.$L211];[$JSON.$K$1];[.$O211];[$JSON.$L$1];[.$N211];[$JSON.$M$1];[.$R211];[$JSON.$N$1];[.$T211];[$JSON.$O$1];[.$W211];[$JSON.$P$1];[.$A211];[$JSON.$Q$1];[.$B211];[$JSON.$R$1])" office:value-type="string" office:string-value="{&quot;id&quot;:&quot;2-78&quot;,&quot;name&quot;:&quot;RYマーブルオーブ&quot;,&quot;kana&quot;:&quot;ryまーぶるおーぶ&quot;,&quot;traitText&quot;:null,&quot;ruleText&quot;:&quot;魔力ゾーンに置かれたとき、赤か黄の他のマリョクが自分の魔力ゾーンにないなら、自分の戦場のガーディアン1体を山札の上に戻す。&quot;,&quot;legacyText&quot;:&quot;復元&quot;,&quot;imageUrl&quot;:&quot;https://one-draw.jp/ijinden/cardlist/002/card/02_078.png&quot;,&quot;expansion&quot;:25,&quot;rarity&quot;:2,&quot;type&quot;:4,&quot;level&quot;:2,&quot;color&quot;:41,&quot;term&quot;:0,&quot;trait&quot;:0,&quot;legacy&quot;:3,&quot;orderTable&quot;:210,&quot;orderDeck&quot;:384}," calcext:value-type="string">
            <text:p>{"id":"2-78","name":"RYマーブルオーブ","kana":"ryまーぶるおーぶ","traitText":null,"ruleText":"魔力ゾーンに置かれたとき、赤か黄の他のマリョクが自分の魔力ゾーンにないなら、自分の戦場のガーディアン1体を山札の上に戻す。","legacyText":"復元","imageUrl":"https://one-draw.jp/ijinden/cardlist/002/card/02_078.png","expansion":25,"rarity":2,"type":4,"level":2,"color":41,"term":0,"trait":0,"legacy":3,"orderTable":210,"orderDeck":384},</text:p>
          </table:table-cell>
          <table:table-cell table:number-columns-repeated="16347"/>
        </table:table-row>
        <table:table-row table:style-name="ro2">
          <table:table-cell office:value-type="float" office:value="211" calcext:value-type="float">
            <text:p>211</text:p>
          </table:table-cell>
          <table:table-cell office:value-type="float" office:value="385" calcext:value-type="float">
            <text:p>385</text:p>
          </table:table-cell>
          <table:table-cell office:value-type="string" calcext:value-type="string">
            <text:p>2-79</text:p>
          </table:table-cell>
          <table:table-cell office:value-type="float" office:value="79" calcext:value-type="float">
            <text:p>79</text:p>
          </table:table-cell>
          <table:table-cell office:value-type="string" calcext:value-type="string">
            <text:p>BYマーブルオーブ</text:p>
          </table:table-cell>
          <table:table-cell office:value-type="string" calcext:value-type="string">
            <text:p>byまーぶるおーぶ</text:p>
          </table:table-cell>
          <table:table-cell office:value-type="string" calcext:value-type="string">
            <text:p>第２弾ブースターパック</text:p>
          </table:table-cell>
          <table:table-cell table:formula="of:=VLOOKUP([.G212];[$収録番号.$A$1:$収録番号.$B$9];2;0)" office:value-type="float" office:value="25" calcext:value-type="float">
            <text:p>25</text:p>
          </table:table-cell>
          <table:table-cell office:value-type="string" calcext:value-type="string">
            <text:p>R</text:p>
          </table:table-cell>
          <table:table-cell table:formula="of:=VLOOKUP([.I212];[$レアリティ番号.$A$1:$レアリティ番号.$B$4];2;0)" office:value-type="float" office:value="2" calcext:value-type="float">
            <text:p>2</text:p>
          </table:table-cell>
          <table:table-cell office:value-type="string" calcext:value-type="string">
            <text:p>マリョク</text:p>
          </table:table-cell>
          <table:table-cell table:formula="of:=VLOOKUP([.K212];[$種類番号.$A$1:$種類番号.$B$4];2;0)" office:value-type="float" office:value="4" calcext:value-type="float">
            <text:p>4</text:p>
          </table:table-cell>
          <table:table-cell office:value-type="string" calcext:value-type="string">
            <text:p>青黄</text:p>
          </table:table-cell>
          <table:table-cell table:formula="of:=VLOOKUP([.M212];[$色番号.$A$1:$色番号.$B$10];2;0)" office:value-type="float" office:value="42" calcext:value-type="float">
            <text:p>4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1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12];[$特性番号.$A$1:$特性番号.$B$8];2;0);0)" office:value-type="float" office:value="0" calcext:value-type="float">
            <text:p>0</text:p>
          </table:table-cell>
          <table:table-cell office:value-type="string" calcext:value-type="string">
            <text:p>魔力ゾーンに置かれたとき、青か黄の他のマリョクが自分の魔力ゾーンにないなら、自分の戦場のガーディアン1体を山札の上に戻す。</text:p>
          </table:table-cell>
          <table:table-cell table:style-name="ce8" office:value-type="string" calcext:value-type="string">
            <text:p>復元</text:p>
          </table:table-cell>
          <table:table-cell table:formula="of:=IFERROR(VLOOKUP([.$V212];[$遺業能力番号.$A$1:$遺業能力番号.$B$9];2;0);0)" office:value-type="float" office:value="3" calcext:value-type="float">
            <text:p>3</text:p>
          </table:table-cell>
          <table:table-cell office:value-type="string" calcext:value-type="string">
            <text:p>https://one-draw.jp/ijinden/cardlist/002/card/02_079.png</text:p>
          </table:table-cell>
          <table:table-cell table:formula="of:=CONCATENATE([$JSON.$A$1];[.$C212];[$JSON.$B$1];[.$E212];[$JSON.$C$1];[.$F212];[$JSON.$D$1];IF(ISNA([.$S212]);&quot;null&quot;;&quot;&quot;&quot;&quot;&amp;[.$S212]&amp;&quot;&quot;&quot;&quot;);[$JSON.$E$1];[.$U212];[$JSON.$F$1];IF(ISNA([.$V212]);&quot;null&quot;;&quot;&quot;&quot;&quot;&amp;[.$V212]&amp;&quot;&quot;&quot;&quot;);[$JSON.$G$1];[.$X212];[$JSON.$H$1];[.$H212];[$JSON.$I$1];[.J212];[$JSON.$J$1];[.$L212];[$JSON.$K$1];[.$O212];[$JSON.$L$1];[.$N212];[$JSON.$M$1];[.$R212];[$JSON.$N$1];[.$T212];[$JSON.$O$1];[.$W212];[$JSON.$P$1];[.$A212];[$JSON.$Q$1];[.$B212];[$JSON.$R$1])" office:value-type="string" office:string-value="{&quot;id&quot;:&quot;2-79&quot;,&quot;name&quot;:&quot;BYマーブルオーブ&quot;,&quot;kana&quot;:&quot;byまーぶるおーぶ&quot;,&quot;traitText&quot;:null,&quot;ruleText&quot;:&quot;魔力ゾーンに置かれたとき、青か黄の他のマリョクが自分の魔力ゾーンにないなら、自分の戦場のガーディアン1体を山札の上に戻す。&quot;,&quot;legacyText&quot;:&quot;復元&quot;,&quot;imageUrl&quot;:&quot;https://one-draw.jp/ijinden/cardlist/002/card/02_079.png&quot;,&quot;expansion&quot;:25,&quot;rarity&quot;:2,&quot;type&quot;:4,&quot;level&quot;:2,&quot;color&quot;:42,&quot;term&quot;:0,&quot;trait&quot;:0,&quot;legacy&quot;:3,&quot;orderTable&quot;:211,&quot;orderDeck&quot;:385}," calcext:value-type="string">
            <text:p>{"id":"2-79","name":"BYマーブルオーブ","kana":"byまーぶるおーぶ","traitText":null,"ruleText":"魔力ゾーンに置かれたとき、青か黄の他のマリョクが自分の魔力ゾーンにないなら、自分の戦場のガーディアン1体を山札の上に戻す。","legacyText":"復元","imageUrl":"https://one-draw.jp/ijinden/cardlist/002/card/02_079.png","expansion":25,"rarity":2,"type":4,"level":2,"color":42,"term":0,"trait":0,"legacy":3,"orderTable":211,"orderDeck":385},</text:p>
          </table:table-cell>
          <table:table-cell table:number-columns-repeated="16347"/>
        </table:table-row>
        <table:table-row table:style-name="ro2">
          <table:table-cell office:value-type="float" office:value="212" calcext:value-type="float">
            <text:p>212</text:p>
          </table:table-cell>
          <table:table-cell office:value-type="float" office:value="386" calcext:value-type="float">
            <text:p>386</text:p>
          </table:table-cell>
          <table:table-cell office:value-type="string" calcext:value-type="string">
            <text:p>2-80</text:p>
          </table:table-cell>
          <table:table-cell office:value-type="float" office:value="80" calcext:value-type="float">
            <text:p>80</text:p>
          </table:table-cell>
          <table:table-cell office:value-type="string" calcext:value-type="string">
            <text:p>GYマーブルオーブ</text:p>
          </table:table-cell>
          <table:table-cell office:value-type="string" calcext:value-type="string">
            <text:p>gyまーぶるおーぶ</text:p>
          </table:table-cell>
          <table:table-cell office:value-type="string" calcext:value-type="string">
            <text:p>第２弾ブースターパック</text:p>
          </table:table-cell>
          <table:table-cell table:formula="of:=VLOOKUP([.G213];[$収録番号.$A$1:$収録番号.$B$9];2;0)" office:value-type="float" office:value="25" calcext:value-type="float">
            <text:p>25</text:p>
          </table:table-cell>
          <table:table-cell office:value-type="string" calcext:value-type="string">
            <text:p>R</text:p>
          </table:table-cell>
          <table:table-cell table:formula="of:=VLOOKUP([.I213];[$レアリティ番号.$A$1:$レアリティ番号.$B$4];2;0)" office:value-type="float" office:value="2" calcext:value-type="float">
            <text:p>2</text:p>
          </table:table-cell>
          <table:table-cell office:value-type="string" calcext:value-type="string">
            <text:p>マリョク</text:p>
          </table:table-cell>
          <table:table-cell table:formula="of:=VLOOKUP([.K213];[$種類番号.$A$1:$種類番号.$B$4];2;0)" office:value-type="float" office:value="4" calcext:value-type="float">
            <text:p>4</text:p>
          </table:table-cell>
          <table:table-cell office:value-type="string" calcext:value-type="string">
            <text:p>緑黄</text:p>
          </table:table-cell>
          <table:table-cell table:formula="of:=VLOOKUP([.M213];[$色番号.$A$1:$色番号.$B$10];2;0)" office:value-type="float" office:value="44" calcext:value-type="float">
            <text:p>4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1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13];[$特性番号.$A$1:$特性番号.$B$8];2;0);0)" office:value-type="float" office:value="0" calcext:value-type="float">
            <text:p>0</text:p>
          </table:table-cell>
          <table:table-cell office:value-type="string" calcext:value-type="string">
            <text:p>魔力ゾーンに置かれたとき、緑か黄の他のマリョクが自分の魔力ゾーンにないなら、自分の戦場のガーディアン1体を山札の上に戻す。</text:p>
          </table:table-cell>
          <table:table-cell table:style-name="ce8" office:value-type="string" calcext:value-type="string">
            <text:p>復元</text:p>
          </table:table-cell>
          <table:table-cell table:formula="of:=IFERROR(VLOOKUP([.$V213];[$遺業能力番号.$A$1:$遺業能力番号.$B$9];2;0);0)" office:value-type="float" office:value="3" calcext:value-type="float">
            <text:p>3</text:p>
          </table:table-cell>
          <table:table-cell office:value-type="string" calcext:value-type="string">
            <text:p>https://one-draw.jp/ijinden/cardlist/002/card/02_080.png</text:p>
          </table:table-cell>
          <table:table-cell table:formula="of:=CONCATENATE([$JSON.$A$1];[.$C213];[$JSON.$B$1];[.$E213];[$JSON.$C$1];[.$F213];[$JSON.$D$1];IF(ISNA([.$S213]);&quot;null&quot;;&quot;&quot;&quot;&quot;&amp;[.$S213]&amp;&quot;&quot;&quot;&quot;);[$JSON.$E$1];[.$U213];[$JSON.$F$1];IF(ISNA([.$V213]);&quot;null&quot;;&quot;&quot;&quot;&quot;&amp;[.$V213]&amp;&quot;&quot;&quot;&quot;);[$JSON.$G$1];[.$X213];[$JSON.$H$1];[.$H213];[$JSON.$I$1];[.J213];[$JSON.$J$1];[.$L213];[$JSON.$K$1];[.$O213];[$JSON.$L$1];[.$N213];[$JSON.$M$1];[.$R213];[$JSON.$N$1];[.$T213];[$JSON.$O$1];[.$W213];[$JSON.$P$1];[.$A213];[$JSON.$Q$1];[.$B213];[$JSON.$R$1])" office:value-type="string" office:string-value="{&quot;id&quot;:&quot;2-80&quot;,&quot;name&quot;:&quot;GYマーブルオーブ&quot;,&quot;kana&quot;:&quot;gyまーぶるおーぶ&quot;,&quot;traitText&quot;:null,&quot;ruleText&quot;:&quot;魔力ゾーンに置かれたとき、緑か黄の他のマリョクが自分の魔力ゾーンにないなら、自分の戦場のガーディアン1体を山札の上に戻す。&quot;,&quot;legacyText&quot;:&quot;復元&quot;,&quot;imageUrl&quot;:&quot;https://one-draw.jp/ijinden/cardlist/002/card/02_080.png&quot;,&quot;expansion&quot;:25,&quot;rarity&quot;:2,&quot;type&quot;:4,&quot;level&quot;:2,&quot;color&quot;:44,&quot;term&quot;:0,&quot;trait&quot;:0,&quot;legacy&quot;:3,&quot;orderTable&quot;:212,&quot;orderDeck&quot;:386}," calcext:value-type="string">
            <text:p>{"id":"2-80","name":"GYマーブルオーブ","kana":"gyまーぶるおーぶ","traitText":null,"ruleText":"魔力ゾーンに置かれたとき、緑か黄の他のマリョクが自分の魔力ゾーンにないなら、自分の戦場のガーディアン1体を山札の上に戻す。","legacyText":"復元","imageUrl":"https://one-draw.jp/ijinden/cardlist/002/card/02_080.png","expansion":25,"rarity":2,"type":4,"level":2,"color":44,"term":0,"trait":0,"legacy":3,"orderTable":212,"orderDeck":386},</text:p>
          </table:table-cell>
          <table:table-cell table:number-columns-repeated="16347"/>
        </table:table-row>
        <table:table-row table:style-name="ro2">
          <table:table-cell office:value-type="float" office:value="213" calcext:value-type="float">
            <text:p>213</text:p>
          </table:table-cell>
          <table:table-cell office:value-type="float" office:value="139" calcext:value-type="float">
            <text:p>139</text:p>
          </table:table-cell>
          <table:table-cell office:value-type="string" calcext:value-type="string">
            <text:p>P-1</text:p>
          </table:table-cell>
          <table:table-cell office:value-type="float" office:value="1" calcext:value-type="float">
            <text:p>1</text:p>
          </table:table-cell>
          <table:table-cell office:value-type="string" calcext:value-type="string">
            <text:p>マリ・キュリー</text:p>
          </table:table-cell>
          <table:table-cell office:value-type="string" calcext:value-type="string">
            <text:p>まりきゅりー</text:p>
          </table:table-cell>
          <table:table-cell office:value-type="string" calcext:value-type="string">
            <text:p>発展する医療デッキ</text:p>
          </table:table-cell>
          <table:table-cell table:formula="of:=VLOOKUP([.G214];[$収録番号.$A$1:$収録番号.$B$9];2;0)" office:value-type="float" office:value="30" calcext:value-type="float">
            <text:p>30</text:p>
          </table:table-cell>
          <table:table-cell office:value-type="string" calcext:value-type="string">
            <text:p>SR</text:p>
          </table:table-cell>
          <table:table-cell table:formula="of:=VLOOKUP([.I214];[$レアリティ番号.$A$1:$レアリティ番号.$B$4];2;0)" office:value-type="float" office:value="4" calcext:value-type="float">
            <text:p>4</text:p>
          </table:table-cell>
          <table:table-cell office:value-type="string" calcext:value-type="string">
            <text:p>イジン</text:p>
          </table:table-cell>
          <table:table-cell table:formula="of:=VLOOKUP([.K214];[$種類番号.$A$1:$種類番号.$B$4];2;0)" office:value-type="float" office:value="1" calcext:value-type="float">
            <text:p>1</text:p>
          </table:table-cell>
          <table:table-cell office:value-type="string" calcext:value-type="string">
            <text:p>紫</text:p>
          </table:table-cell>
          <table:table-cell table:formula="of:=VLOOKUP([.M214];[$色番号.$A$1:$色番号.$B$10];2;0)" office:value-type="float" office:value="16" calcext:value-type="float">
            <text:p>16</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1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14];[$特性番号.$A$1:$特性番号.$B$8];2;0);0)" office:value-type="float" office:value="0" calcext:value-type="float">
            <text:p>0</text:p>
          </table:table-cell>
          <table:table-cell office:value-type="string" calcext:value-type="string">
            <text:p>戦場に置かれたとき、相手の手札が自分の手札より多いなら発動する。相手の手札を自分の手札と同じ枚数になるように墓地に置く。墓地に置く手札は相手が選ぶ。</text:p>
          </table:table-cell>
          <table:table-cell office:value-type="string" calcext:value-type="string">
            <text:p>木霊</text:p>
          </table:table-cell>
          <table:table-cell table:formula="of:=IFERROR(VLOOKUP([.$V214];[$遺業能力番号.$A$1:$遺業能力番号.$B$9];2;0);0)" office:value-type="float" office:value="8" calcext:value-type="float">
            <text:p>8</text:p>
          </table:table-cell>
          <table:table-cell office:value-type="string" calcext:value-type="string">
            <text:p>https://one-draw.jp/ijinden/cardlist/P01/card/03_P_001.png</text:p>
          </table:table-cell>
          <table:table-cell table:formula="of:=CONCATENATE([$JSON.$A$1];[.$C214];[$JSON.$B$1];[.$E214];[$JSON.$C$1];[.$F214];[$JSON.$D$1];IF(ISNA([.$S214]);&quot;null&quot;;&quot;&quot;&quot;&quot;&amp;[.$S214]&amp;&quot;&quot;&quot;&quot;);[$JSON.$E$1];[.$U214];[$JSON.$F$1];IF(ISNA([.$V214]);&quot;null&quot;;&quot;&quot;&quot;&quot;&amp;[.$V214]&amp;&quot;&quot;&quot;&quot;);[$JSON.$G$1];[.$X214];[$JSON.$H$1];[.$H214];[$JSON.$I$1];[.J214];[$JSON.$J$1];[.$L214];[$JSON.$K$1];[.$O214];[$JSON.$L$1];[.$N214];[$JSON.$M$1];[.$R214];[$JSON.$N$1];[.$T214];[$JSON.$O$1];[.$W214];[$JSON.$P$1];[.$A214];[$JSON.$Q$1];[.$B214];[$JSON.$R$1])" office:value-type="string" office:string-value="{&quot;id&quot;:&quot;P-1&quot;,&quot;name&quot;:&quot;マリ・キュリー&quot;,&quot;kana&quot;:&quot;まりきゅりー&quot;,&quot;traitText&quot;:null,&quot;ruleText&quot;:&quot;戦場に置かれたとき、相手の手札が自分の手札より多いなら発動する。相手の手札を自分の手札と同じ枚数になるように墓地に置く。墓地に置く手札は相手が選ぶ。&quot;,&quot;legacyText&quot;:&quot;木霊&quot;,&quot;imageUrl&quot;:&quot;https://one-draw.jp/ijinden/cardlist/P01/card/03_P_001.png&quot;,&quot;expansion&quot;:30,&quot;rarity&quot;:4,&quot;type&quot;:1,&quot;level&quot;:4,&quot;color&quot;:16,&quot;term&quot;:0,&quot;trait&quot;:0,&quot;legacy&quot;:8,&quot;orderTable&quot;:213,&quot;orderDeck&quot;:139}," calcext:value-type="string">
            <text:p>{"id":"P-1","name":"マリ・キュリー","kana":"まりきゅりー","traitText":null,"ruleText":"戦場に置かれたとき、相手の手札が自分の手札より多いなら発動する。相手の手札を自分の手札と同じ枚数になるように墓地に置く。墓地に置く手札は相手が選ぶ。","legacyText":"木霊","imageUrl":"https://one-draw.jp/ijinden/cardlist/P01/card/03_P_001.png","expansion":30,"rarity":4,"type":1,"level":4,"color":16,"term":0,"trait":0,"legacy":8,"orderTable":213,"orderDeck":139},</text:p>
          </table:table-cell>
          <table:table-cell table:number-columns-repeated="16347"/>
        </table:table-row>
        <table:table-row table:style-name="ro2">
          <table:table-cell office:value-type="float" office:value="214" calcext:value-type="float">
            <text:p>214</text:p>
          </table:table-cell>
          <table:table-cell office:value-type="float" office:value="20" calcext:value-type="float">
            <text:p>20</text:p>
          </table:table-cell>
          <table:table-cell office:value-type="string" calcext:value-type="string">
            <text:p>P-2</text:p>
          </table:table-cell>
          <table:table-cell office:value-type="float" office:value="2" calcext:value-type="float">
            <text:p>2</text:p>
          </table:table-cell>
          <table:table-cell office:value-type="string" calcext:value-type="string">
            <text:p>篤姫</text:p>
          </table:table-cell>
          <table:table-cell office:value-type="string" calcext:value-type="string">
            <text:p>あつひめ</text:p>
          </table:table-cell>
          <table:table-cell office:value-type="string" calcext:value-type="string">
            <text:p>発展する医療デッキ</text:p>
          </table:table-cell>
          <table:table-cell table:formula="of:=VLOOKUP([.G215];[$収録番号.$A$1:$収録番号.$B$9];2;0)" office:value-type="float" office:value="30" calcext:value-type="float">
            <text:p>30</text:p>
          </table:table-cell>
          <table:table-cell office:value-type="string" calcext:value-type="string">
            <text:p>N</text:p>
          </table:table-cell>
          <table:table-cell table:formula="of:=VLOOKUP([.I215];[$レアリティ番号.$A$1:$レアリティ番号.$B$4];2;0)" office:value-type="float" office:value="1" calcext:value-type="float">
            <text:p>1</text:p>
          </table:table-cell>
          <table:table-cell office:value-type="string" calcext:value-type="string">
            <text:p>イジン</text:p>
          </table:table-cell>
          <table:table-cell table:formula="of:=VLOOKUP([.K215];[$種類番号.$A$1:$種類番号.$B$4];2;0)" office:value-type="float" office:value="1" calcext:value-type="float">
            <text:p>1</text:p>
          </table:table-cell>
          <table:table-cell office:value-type="string" calcext:value-type="string">
            <text:p>紫</text:p>
          </table:table-cell>
          <table:table-cell table:formula="of:=VLOOKUP([.M215];[$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1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15];[$特性番号.$A$1:$特性番号.$B$8];2;0);0)" office:value-type="float" office:value="0" calcext:value-type="float">
            <text:p>0</text:p>
          </table:table-cell>
          <table:table-cell office:value-type="string" calcext:value-type="string">
            <text:p>戦場に置かれたとき、戦場の裏のカード1つの表を見る。</text:p>
          </table:table-cell>
          <table:table-cell office:value-type="string" calcext:value-type="string">
            <text:p>魔力化</text:p>
          </table:table-cell>
          <table:table-cell table:formula="of:=IFERROR(VLOOKUP([.$V215];[$遺業能力番号.$A$1:$遺業能力番号.$B$9];2;0);0)" office:value-type="float" office:value="1" calcext:value-type="float">
            <text:p>1</text:p>
          </table:table-cell>
          <table:table-cell office:value-type="string" calcext:value-type="string">
            <text:p>https://one-draw.jp/ijinden/cardlist/P01/card/03_P_002.png</text:p>
          </table:table-cell>
          <table:table-cell table:formula="of:=CONCATENATE([$JSON.$A$1];[.$C215];[$JSON.$B$1];[.$E215];[$JSON.$C$1];[.$F215];[$JSON.$D$1];IF(ISNA([.$S215]);&quot;null&quot;;&quot;&quot;&quot;&quot;&amp;[.$S215]&amp;&quot;&quot;&quot;&quot;);[$JSON.$E$1];[.$U215];[$JSON.$F$1];IF(ISNA([.$V215]);&quot;null&quot;;&quot;&quot;&quot;&quot;&amp;[.$V215]&amp;&quot;&quot;&quot;&quot;);[$JSON.$G$1];[.$X215];[$JSON.$H$1];[.$H215];[$JSON.$I$1];[.J215];[$JSON.$J$1];[.$L215];[$JSON.$K$1];[.$O215];[$JSON.$L$1];[.$N215];[$JSON.$M$1];[.$R215];[$JSON.$N$1];[.$T215];[$JSON.$O$1];[.$W215];[$JSON.$P$1];[.$A215];[$JSON.$Q$1];[.$B215];[$JSON.$R$1])" office:value-type="string" office:string-value="{&quot;id&quot;:&quot;P-2&quot;,&quot;name&quot;:&quot;篤姫&quot;,&quot;kana&quot;:&quot;あつひめ&quot;,&quot;traitText&quot;:null,&quot;ruleText&quot;:&quot;戦場に置かれたとき、戦場の裏のカード1つの表を見る。&quot;,&quot;legacyText&quot;:&quot;魔力化&quot;,&quot;imageUrl&quot;:&quot;https://one-draw.jp/ijinden/cardlist/P01/card/03_P_002.png&quot;,&quot;expansion&quot;:30,&quot;rarity&quot;:1,&quot;type&quot;:1,&quot;level&quot;:1,&quot;color&quot;:16,&quot;term&quot;:0,&quot;trait&quot;:0,&quot;legacy&quot;:1,&quot;orderTable&quot;:214,&quot;orderDeck&quot;:20}," calcext:value-type="string">
            <text:p>{"id":"P-2","name":"篤姫","kana":"あつひめ","traitText":null,"ruleText":"戦場に置かれたとき、戦場の裏のカード1つの表を見る。","legacyText":"魔力化","imageUrl":"https://one-draw.jp/ijinden/cardlist/P01/card/03_P_002.png","expansion":30,"rarity":1,"type":1,"level":1,"color":16,"term":0,"trait":0,"legacy":1,"orderTable":214,"orderDeck":20},</text:p>
          </table:table-cell>
          <table:table-cell table:number-columns-repeated="16347"/>
        </table:table-row>
        <table:table-row table:style-name="ro2">
          <table:table-cell office:value-type="float" office:value="215" calcext:value-type="float">
            <text:p>215</text:p>
          </table:table-cell>
          <table:table-cell office:value-type="float" office:value="58" calcext:value-type="float">
            <text:p>58</text:p>
          </table:table-cell>
          <table:table-cell office:value-type="string" calcext:value-type="string">
            <text:p>P-3</text:p>
          </table:table-cell>
          <table:table-cell office:value-type="float" office:value="3" calcext:value-type="float">
            <text:p>3</text:p>
          </table:table-cell>
          <table:table-cell office:value-type="string" calcext:value-type="string">
            <text:p>李成桂</text:p>
          </table:table-cell>
          <table:table-cell office:value-type="string" calcext:value-type="string">
            <text:p>りせいけい</text:p>
          </table:table-cell>
          <table:table-cell office:value-type="string" calcext:value-type="string">
            <text:p>発展する医療デッキ</text:p>
          </table:table-cell>
          <table:table-cell table:formula="of:=VLOOKUP([.G216];[$収録番号.$A$1:$収録番号.$B$9];2;0)" office:value-type="float" office:value="30" calcext:value-type="float">
            <text:p>30</text:p>
          </table:table-cell>
          <table:table-cell office:value-type="string" calcext:value-type="string">
            <text:p>N</text:p>
          </table:table-cell>
          <table:table-cell table:formula="of:=VLOOKUP([.I216];[$レアリティ番号.$A$1:$レアリティ番号.$B$4];2;0)" office:value-type="float" office:value="1" calcext:value-type="float">
            <text:p>1</text:p>
          </table:table-cell>
          <table:table-cell office:value-type="string" calcext:value-type="string">
            <text:p>イジン</text:p>
          </table:table-cell>
          <table:table-cell table:formula="of:=VLOOKUP([.K216];[$種類番号.$A$1:$種類番号.$B$4];2;0)" office:value-type="float" office:value="1" calcext:value-type="float">
            <text:p>1</text:p>
          </table:table-cell>
          <table:table-cell office:value-type="string" calcext:value-type="string">
            <text:p>紫</text:p>
          </table:table-cell>
          <table:table-cell table:formula="of:=VLOOKUP([.M216];[$色番号.$A$1:$色番号.$B$10];2;0)" office:value-type="float" office:value="16" calcext:value-type="float">
            <text:p>16</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1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16];[$特性番号.$A$1:$特性番号.$B$8];2;0);0)" office:value-type="float" office:value="0" calcext:value-type="float">
            <text:p>0</text:p>
          </table:table-cell>
          <table:table-cell office:value-type="string" calcext:value-type="string">
            <text:p>スタンド¶戦場に置かれたとき、自分の戦場のガーディアン1体か、自分の墓地のカード1つを指定して発動できる。そのカードを山札の上に戻す。</text:p>
          </table:table-cell>
          <table:table-cell office:value-type="string" calcext:value-type="string">
            <text:p>1ドローする</text:p>
          </table:table-cell>
          <table:table-cell table:formula="of:=IFERROR(VLOOKUP([.$V216];[$遺業能力番号.$A$1:$遺業能力番号.$B$9];2;0);0)" office:value-type="float" office:value="4" calcext:value-type="float">
            <text:p>4</text:p>
          </table:table-cell>
          <table:table-cell office:value-type="string" calcext:value-type="string">
            <text:p>https://one-draw.jp/ijinden/cardlist/P01/card/03_P_003.png</text:p>
          </table:table-cell>
          <table:table-cell table:formula="of:=CONCATENATE([$JSON.$A$1];[.$C216];[$JSON.$B$1];[.$E216];[$JSON.$C$1];[.$F216];[$JSON.$D$1];IF(ISNA([.$S216]);&quot;null&quot;;&quot;&quot;&quot;&quot;&amp;[.$S216]&amp;&quot;&quot;&quot;&quot;);[$JSON.$E$1];[.$U216];[$JSON.$F$1];IF(ISNA([.$V216]);&quot;null&quot;;&quot;&quot;&quot;&quot;&amp;[.$V216]&amp;&quot;&quot;&quot;&quot;);[$JSON.$G$1];[.$X216];[$JSON.$H$1];[.$H216];[$JSON.$I$1];[.J216];[$JSON.$J$1];[.$L216];[$JSON.$K$1];[.$O216];[$JSON.$L$1];[.$N216];[$JSON.$M$1];[.$R216];[$JSON.$N$1];[.$T216];[$JSON.$O$1];[.$W216];[$JSON.$P$1];[.$A216];[$JSON.$Q$1];[.$B216];[$JSON.$R$1])" office:value-type="string" office:string-value="{&quot;id&quot;:&quot;P-3&quot;,&quot;name&quot;:&quot;李成桂&quot;,&quot;kana&quot;:&quot;りせいけい&quot;,&quot;traitText&quot;:null,&quot;ruleText&quot;:&quot;スタンド¶戦場に置かれたとき、自分の戦場のガーディアン1体か、自分の墓地のカード1つを指定して発動できる。そのカードを山札の上に戻す。&quot;,&quot;legacyText&quot;:&quot;1ドローする&quot;,&quot;imageUrl&quot;:&quot;https://one-draw.jp/ijinden/cardlist/P01/card/03_P_003.png&quot;,&quot;expansion&quot;:30,&quot;rarity&quot;:1,&quot;type&quot;:1,&quot;level&quot;:2,&quot;color&quot;:16,&quot;term&quot;:0,&quot;trait&quot;:0,&quot;legacy&quot;:4,&quot;orderTable&quot;:215,&quot;orderDeck&quot;:58}," calcext:value-type="string">
            <text:p>{"id":"P-3","name":"李成桂","kana":"りせいけい","traitText":null,"ruleText":"スタンド¶戦場に置かれたとき、自分の戦場のガーディアン1体か、自分の墓地のカード1つを指定して発動できる。そのカードを山札の上に戻す。","legacyText":"1ドローする","imageUrl":"https://one-draw.jp/ijinden/cardlist/P01/card/03_P_003.png","expansion":30,"rarity":1,"type":1,"level":2,"color":16,"term":0,"trait":0,"legacy":4,"orderTable":215,"orderDeck":58},</text:p>
          </table:table-cell>
          <table:table-cell table:number-columns-repeated="16347"/>
        </table:table-row>
        <table:table-row table:style-name="ro2">
          <table:table-cell office:value-type="float" office:value="216" calcext:value-type="float">
            <text:p>216</text:p>
          </table:table-cell>
          <table:table-cell office:value-type="float" office:value="140" calcext:value-type="float">
            <text:p>140</text:p>
          </table:table-cell>
          <table:table-cell office:value-type="string" calcext:value-type="string">
            <text:p>P-4</text:p>
          </table:table-cell>
          <table:table-cell office:value-type="float" office:value="4" calcext:value-type="float">
            <text:p>4</text:p>
          </table:table-cell>
          <table:table-cell office:value-type="string" calcext:value-type="string">
            <text:p>杉田玄白</text:p>
          </table:table-cell>
          <table:table-cell office:value-type="string" calcext:value-type="string">
            <text:p>すぎたげんぱく</text:p>
          </table:table-cell>
          <table:table-cell office:value-type="string" calcext:value-type="string">
            <text:p>発展する医療デッキ</text:p>
          </table:table-cell>
          <table:table-cell table:formula="of:=VLOOKUP([.G217];[$収録番号.$A$1:$収録番号.$B$9];2;0)" office:value-type="float" office:value="30" calcext:value-type="float">
            <text:p>30</text:p>
          </table:table-cell>
          <table:table-cell office:value-type="string" calcext:value-type="string">
            <text:p>N</text:p>
          </table:table-cell>
          <table:table-cell table:formula="of:=VLOOKUP([.I217];[$レアリティ番号.$A$1:$レアリティ番号.$B$4];2;0)" office:value-type="float" office:value="1" calcext:value-type="float">
            <text:p>1</text:p>
          </table:table-cell>
          <table:table-cell office:value-type="string" calcext:value-type="string">
            <text:p>イジン</text:p>
          </table:table-cell>
          <table:table-cell table:formula="of:=VLOOKUP([.K217];[$種類番号.$A$1:$種類番号.$B$4];2;0)" office:value-type="float" office:value="1" calcext:value-type="float">
            <text:p>1</text:p>
          </table:table-cell>
          <table:table-cell office:value-type="string" calcext:value-type="string">
            <text:p>紫</text:p>
          </table:table-cell>
          <table:table-cell table:formula="of:=VLOOKUP([.M217];[$色番号.$A$1:$色番号.$B$10];2;0)" office:value-type="float" office:value="16" calcext:value-type="float">
            <text:p>16</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17];[$能力語番号.$A$1:$能力語番号.$B$10];2;0);0)" office:value-type="float" office:value="0" calcext:value-type="float">
            <text:p>0</text:p>
          </table:table-cell>
          <table:table-cell office:value-type="string" calcext:value-type="string">
            <text:p>医術</text:p>
          </table:table-cell>
          <table:table-cell table:formula="of:=IFERROR(VLOOKUP([.$S217];[$特性番号.$A$1:$特性番号.$B$8];2;0);0)" office:value-type="float" office:value="16" calcext:value-type="float">
            <text:p>16</text:p>
          </table:table-cell>
          <table:table-cell office:value-type="string" calcext:value-type="string">
            <text:p>能力によって手札から墓地にイジンでないカードが置かれるたび、そのカードのプレイヤーの山札の上から1枚を墓地に置く。</text:p>
          </table:table-cell>
          <table:table-cell table:formula="of:=NA()" office:value-type="string" office:string-value="" calcext:value-type="error">
            <text:p>#N/A</text:p>
          </table:table-cell>
          <table:table-cell table:formula="of:=IFERROR(VLOOKUP([.$V217];[$遺業能力番号.$A$1:$遺業能力番号.$B$9];2;0);0)" office:value-type="float" office:value="0" calcext:value-type="float">
            <text:p>0</text:p>
          </table:table-cell>
          <table:table-cell office:value-type="string" calcext:value-type="string">
            <text:p>https://one-draw.jp/ijinden/cardlist/P01/card/03_P_004.png</text:p>
          </table:table-cell>
          <table:table-cell table:formula="of:=CONCATENATE([$JSON.$A$1];[.$C217];[$JSON.$B$1];[.$E217];[$JSON.$C$1];[.$F217];[$JSON.$D$1];IF(ISNA([.$S217]);&quot;null&quot;;&quot;&quot;&quot;&quot;&amp;[.$S217]&amp;&quot;&quot;&quot;&quot;);[$JSON.$E$1];[.$U217];[$JSON.$F$1];IF(ISNA([.$V217]);&quot;null&quot;;&quot;&quot;&quot;&quot;&amp;[.$V217]&amp;&quot;&quot;&quot;&quot;);[$JSON.$G$1];[.$X217];[$JSON.$H$1];[.$H217];[$JSON.$I$1];[.J217];[$JSON.$J$1];[.$L217];[$JSON.$K$1];[.$O217];[$JSON.$L$1];[.$N217];[$JSON.$M$1];[.$R217];[$JSON.$N$1];[.$T217];[$JSON.$O$1];[.$W217];[$JSON.$P$1];[.$A217];[$JSON.$Q$1];[.$B217];[$JSON.$R$1])" office:value-type="string" office:string-value="{&quot;id&quot;:&quot;P-4&quot;,&quot;name&quot;:&quot;杉田玄白&quot;,&quot;kana&quot;:&quot;すぎたげんぱく&quot;,&quot;traitText&quot;:&quot;医術&quot;,&quot;ruleText&quot;:&quot;能力によって手札から墓地にイジンでないカードが置かれるたび、そのカードのプレイヤーの山札の上から1枚を墓地に置く。&quot;,&quot;legacyText&quot;:null,&quot;imageUrl&quot;:&quot;https://one-draw.jp/ijinden/cardlist/P01/card/03_P_004.png&quot;,&quot;expansion&quot;:30,&quot;rarity&quot;:1,&quot;type&quot;:1,&quot;level&quot;:4,&quot;color&quot;:16,&quot;term&quot;:0,&quot;trait&quot;:16,&quot;legacy&quot;:0,&quot;orderTable&quot;:216,&quot;orderDeck&quot;:140}," calcext:value-type="string">
            <text:p>{"id":"P-4","name":"杉田玄白","kana":"すぎたげんぱく","traitText":"医術","ruleText":"能力によって手札から墓地にイジンでないカードが置かれるたび、そのカードのプレイヤーの山札の上から1枚を墓地に置く。","legacyText":null,"imageUrl":"https://one-draw.jp/ijinden/cardlist/P01/card/03_P_004.png","expansion":30,"rarity":1,"type":1,"level":4,"color":16,"term":0,"trait":16,"legacy":0,"orderTable":216,"orderDeck":140},</text:p>
          </table:table-cell>
          <table:table-cell table:number-columns-repeated="16347"/>
        </table:table-row>
        <table:table-row table:style-name="ro2">
          <table:table-cell office:value-type="float" office:value="217" calcext:value-type="float">
            <text:p>217</text:p>
          </table:table-cell>
          <table:table-cell office:value-type="float" office:value="59" calcext:value-type="float">
            <text:p>59</text:p>
          </table:table-cell>
          <table:table-cell office:value-type="string" calcext:value-type="string">
            <text:p>P-5</text:p>
          </table:table-cell>
          <table:table-cell office:value-type="float" office:value="5" calcext:value-type="float">
            <text:p>5</text:p>
          </table:table-cell>
          <table:table-cell office:value-type="string" calcext:value-type="string">
            <text:p>渡辺崋山</text:p>
          </table:table-cell>
          <table:table-cell office:value-type="string" calcext:value-type="string">
            <text:p>わたなべかざん</text:p>
          </table:table-cell>
          <table:table-cell office:value-type="string" calcext:value-type="string">
            <text:p>発展する医療デッキ</text:p>
          </table:table-cell>
          <table:table-cell table:formula="of:=VLOOKUP([.G218];[$収録番号.$A$1:$収録番号.$B$9];2;0)" office:value-type="float" office:value="30" calcext:value-type="float">
            <text:p>30</text:p>
          </table:table-cell>
          <table:table-cell office:value-type="string" calcext:value-type="string">
            <text:p>N</text:p>
          </table:table-cell>
          <table:table-cell table:formula="of:=VLOOKUP([.I218];[$レアリティ番号.$A$1:$レアリティ番号.$B$4];2;0)" office:value-type="float" office:value="1" calcext:value-type="float">
            <text:p>1</text:p>
          </table:table-cell>
          <table:table-cell office:value-type="string" calcext:value-type="string">
            <text:p>イジン</text:p>
          </table:table-cell>
          <table:table-cell table:formula="of:=VLOOKUP([.K218];[$種類番号.$A$1:$種類番号.$B$4];2;0)" office:value-type="float" office:value="1" calcext:value-type="float">
            <text:p>1</text:p>
          </table:table-cell>
          <table:table-cell office:value-type="string" calcext:value-type="string">
            <text:p>紫</text:p>
          </table:table-cell>
          <table:table-cell table:formula="of:=VLOOKUP([.M218];[$色番号.$A$1:$色番号.$B$10];2;0)" office:value-type="float" office:value="16" calcext:value-type="float">
            <text:p>16</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18];[$能力語番号.$A$1:$能力語番号.$B$10];2;0);0)" office:value-type="float" office:value="0" calcext:value-type="float">
            <text:p>0</text:p>
          </table:table-cell>
          <table:table-cell office:value-type="string" calcext:value-type="string">
            <text:p>美術</text:p>
          </table:table-cell>
          <table:table-cell table:formula="of:=IFERROR(VLOOKUP([.$S218];[$特性番号.$A$1:$特性番号.$B$8];2;0);0)" office:value-type="float" office:value="2" calcext:value-type="float">
            <text:p>2</text:p>
          </table:table-cell>
          <table:table-cell office:value-type="string" calcext:value-type="string">
            <text:p>戦場に置かれたとき、自分の戦場の「美術」イジン1体につき1ドローする。¶破壊されたとき、自分の戦場の「医術」イジン1体につき、ターンプレイヤーの手札のカード1つを墓地に置く。それらのカードはターンプレイヤーが選ぶ。</text:p>
          </table:table-cell>
          <table:table-cell table:formula="of:=NA()" office:value-type="string" office:string-value="" calcext:value-type="error">
            <text:p>#N/A</text:p>
          </table:table-cell>
          <table:table-cell table:formula="of:=IFERROR(VLOOKUP([.$V218];[$遺業能力番号.$A$1:$遺業能力番号.$B$9];2;0);0)" office:value-type="float" office:value="0" calcext:value-type="float">
            <text:p>0</text:p>
          </table:table-cell>
          <table:table-cell office:value-type="string" calcext:value-type="string">
            <text:p>https://one-draw.jp/ijinden/cardlist/P01/card/03_P_005.png</text:p>
          </table:table-cell>
          <table:table-cell table:formula="of:=CONCATENATE([$JSON.$A$1];[.$C218];[$JSON.$B$1];[.$E218];[$JSON.$C$1];[.$F218];[$JSON.$D$1];IF(ISNA([.$S218]);&quot;null&quot;;&quot;&quot;&quot;&quot;&amp;[.$S218]&amp;&quot;&quot;&quot;&quot;);[$JSON.$E$1];[.$U218];[$JSON.$F$1];IF(ISNA([.$V218]);&quot;null&quot;;&quot;&quot;&quot;&quot;&amp;[.$V218]&amp;&quot;&quot;&quot;&quot;);[$JSON.$G$1];[.$X218];[$JSON.$H$1];[.$H218];[$JSON.$I$1];[.J218];[$JSON.$J$1];[.$L218];[$JSON.$K$1];[.$O218];[$JSON.$L$1];[.$N218];[$JSON.$M$1];[.$R218];[$JSON.$N$1];[.$T218];[$JSON.$O$1];[.$W218];[$JSON.$P$1];[.$A218];[$JSON.$Q$1];[.$B218];[$JSON.$R$1])" office:value-type="string" office:string-value="{&quot;id&quot;:&quot;P-5&quot;,&quot;name&quot;:&quot;渡辺崋山&quot;,&quot;kana&quot;:&quot;わたなべかざん&quot;,&quot;traitText&quot;:&quot;美術&quot;,&quot;ruleText&quot;:&quot;戦場に置かれたとき、自分の戦場の「美術」イジン1体につき1ドローする。¶破壊されたとき、自分の戦場の「医術」イジン1体につき、ターンプレイヤーの手札のカード1つを墓地に置く。それらのカードはターンプレイヤーが選ぶ。&quot;,&quot;legacyText&quot;:null,&quot;imageUrl&quot;:&quot;https://one-draw.jp/ijinden/cardlist/P01/card/03_P_005.png&quot;,&quot;expansion&quot;:30,&quot;rarity&quot;:1,&quot;type&quot;:1,&quot;level&quot;:2,&quot;color&quot;:16,&quot;term&quot;:0,&quot;trait&quot;:2,&quot;legacy&quot;:0,&quot;orderTable&quot;:217,&quot;orderDeck&quot;:59}," calcext:value-type="string">
            <text:p>{"id":"P-5","name":"渡辺崋山","kana":"わたなべかざん","traitText":"美術","ruleText":"戦場に置かれたとき、自分の戦場の「美術」イジン1体につき1ドローする。¶破壊されたとき、自分の戦場の「医術」イジン1体につき、ターンプレイヤーの手札のカード1つを墓地に置く。それらのカードはターンプレイヤーが選ぶ。","legacyText":null,"imageUrl":"https://one-draw.jp/ijinden/cardlist/P01/card/03_P_005.png","expansion":30,"rarity":1,"type":1,"level":2,"color":16,"term":0,"trait":2,"legacy":0,"orderTable":217,"orderDeck":59},</text:p>
          </table:table-cell>
          <table:table-cell table:number-columns-repeated="16347"/>
        </table:table-row>
        <table:table-row table:style-name="ro2">
          <table:table-cell office:value-type="float" office:value="218" calcext:value-type="float">
            <text:p>218</text:p>
          </table:table-cell>
          <table:table-cell office:value-type="float" office:value="101" calcext:value-type="float">
            <text:p>101</text:p>
          </table:table-cell>
          <table:table-cell office:value-type="string" calcext:value-type="string">
            <text:p>P-6</text:p>
          </table:table-cell>
          <table:table-cell office:value-type="float" office:value="6" calcext:value-type="float">
            <text:p>6</text:p>
          </table:table-cell>
          <table:table-cell office:value-type="string" calcext:value-type="string">
            <text:p>緒方洪庵</text:p>
          </table:table-cell>
          <table:table-cell office:value-type="string" calcext:value-type="string">
            <text:p>おがたこうあん</text:p>
          </table:table-cell>
          <table:table-cell office:value-type="string" calcext:value-type="string">
            <text:p>発展する医療デッキ</text:p>
          </table:table-cell>
          <table:table-cell table:formula="of:=VLOOKUP([.G219];[$収録番号.$A$1:$収録番号.$B$9];2;0)" office:value-type="float" office:value="30" calcext:value-type="float">
            <text:p>30</text:p>
          </table:table-cell>
          <table:table-cell office:value-type="string" calcext:value-type="string">
            <text:p>N</text:p>
          </table:table-cell>
          <table:table-cell table:formula="of:=VLOOKUP([.I219];[$レアリティ番号.$A$1:$レアリティ番号.$B$4];2;0)" office:value-type="float" office:value="1" calcext:value-type="float">
            <text:p>1</text:p>
          </table:table-cell>
          <table:table-cell office:value-type="string" calcext:value-type="string">
            <text:p>イジン</text:p>
          </table:table-cell>
          <table:table-cell table:formula="of:=VLOOKUP([.K219];[$種類番号.$A$1:$種類番号.$B$4];2;0)" office:value-type="float" office:value="1" calcext:value-type="float">
            <text:p>1</text:p>
          </table:table-cell>
          <table:table-cell office:value-type="string" calcext:value-type="string">
            <text:p>紫</text:p>
          </table:table-cell>
          <table:table-cell table:formula="of:=VLOOKUP([.M219];[$色番号.$A$1:$色番号.$B$10];2;0)" office:value-type="float" office:value="16" calcext:value-type="float">
            <text:p>16</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19];[$能力語番号.$A$1:$能力語番号.$B$10];2;0);0)" office:value-type="float" office:value="0" calcext:value-type="float">
            <text:p>0</text:p>
          </table:table-cell>
          <table:table-cell office:value-type="string" calcext:value-type="string">
            <text:p>医術</text:p>
          </table:table-cell>
          <table:table-cell table:formula="of:=IFERROR(VLOOKUP([.$S219];[$特性番号.$A$1:$特性番号.$B$8];2;0);0)" office:value-type="float" office:value="16" calcext:value-type="float">
            <text:p>16</text:p>
          </table:table-cell>
          <table:table-cell office:value-type="string" calcext:value-type="string">
            <text:p>能力によって手札から墓地にイジンが置かれるたび、そのカードのプレイヤーは1ドローする。</text:p>
          </table:table-cell>
          <table:table-cell office:value-type="string" calcext:value-type="string">
            <text:p>木霊</text:p>
          </table:table-cell>
          <table:table-cell table:formula="of:=IFERROR(VLOOKUP([.$V219];[$遺業能力番号.$A$1:$遺業能力番号.$B$9];2;0);0)" office:value-type="float" office:value="8" calcext:value-type="float">
            <text:p>8</text:p>
          </table:table-cell>
          <table:table-cell office:value-type="string" calcext:value-type="string">
            <text:p>https://one-draw.jp/ijinden/cardlist/P01/card/03_P_006.png</text:p>
          </table:table-cell>
          <table:table-cell table:formula="of:=CONCATENATE([$JSON.$A$1];[.$C219];[$JSON.$B$1];[.$E219];[$JSON.$C$1];[.$F219];[$JSON.$D$1];IF(ISNA([.$S219]);&quot;null&quot;;&quot;&quot;&quot;&quot;&amp;[.$S219]&amp;&quot;&quot;&quot;&quot;);[$JSON.$E$1];[.$U219];[$JSON.$F$1];IF(ISNA([.$V219]);&quot;null&quot;;&quot;&quot;&quot;&quot;&amp;[.$V219]&amp;&quot;&quot;&quot;&quot;);[$JSON.$G$1];[.$X219];[$JSON.$H$1];[.$H219];[$JSON.$I$1];[.J219];[$JSON.$J$1];[.$L219];[$JSON.$K$1];[.$O219];[$JSON.$L$1];[.$N219];[$JSON.$M$1];[.$R219];[$JSON.$N$1];[.$T219];[$JSON.$O$1];[.$W219];[$JSON.$P$1];[.$A219];[$JSON.$Q$1];[.$B219];[$JSON.$R$1])" office:value-type="string" office:string-value="{&quot;id&quot;:&quot;P-6&quot;,&quot;name&quot;:&quot;緒方洪庵&quot;,&quot;kana&quot;:&quot;おがたこうあん&quot;,&quot;traitText&quot;:&quot;医術&quot;,&quot;ruleText&quot;:&quot;能力によって手札から墓地にイジンが置かれるたび、そのカードのプレイヤーは1ドローする。&quot;,&quot;legacyText&quot;:&quot;木霊&quot;,&quot;imageUrl&quot;:&quot;https://one-draw.jp/ijinden/cardlist/P01/card/03_P_006.png&quot;,&quot;expansion&quot;:30,&quot;rarity&quot;:1,&quot;type&quot;:1,&quot;level&quot;:3,&quot;color&quot;:16,&quot;term&quot;:0,&quot;trait&quot;:16,&quot;legacy&quot;:8,&quot;orderTable&quot;:218,&quot;orderDeck&quot;:101}," calcext:value-type="string">
            <text:p>{"id":"P-6","name":"緒方洪庵","kana":"おがたこうあん","traitText":"医術","ruleText":"能力によって手札から墓地にイジンが置かれるたび、そのカードのプレイヤーは1ドローする。","legacyText":"木霊","imageUrl":"https://one-draw.jp/ijinden/cardlist/P01/card/03_P_006.png","expansion":30,"rarity":1,"type":1,"level":3,"color":16,"term":0,"trait":16,"legacy":8,"orderTable":218,"orderDeck":101},</text:p>
          </table:table-cell>
          <table:table-cell table:number-columns-repeated="16347"/>
        </table:table-row>
        <table:table-row table:style-name="ro2">
          <table:table-cell office:value-type="float" office:value="219" calcext:value-type="float">
            <text:p>219</text:p>
          </table:table-cell>
          <table:table-cell office:value-type="float" office:value="177" calcext:value-type="float">
            <text:p>177</text:p>
          </table:table-cell>
          <table:table-cell office:value-type="string" calcext:value-type="string">
            <text:p>P-7</text:p>
          </table:table-cell>
          <table:table-cell office:value-type="float" office:value="7" calcext:value-type="float">
            <text:p>7</text:p>
          </table:table-cell>
          <table:table-cell office:value-type="string" calcext:value-type="string">
            <text:p>岡田以蔵</text:p>
          </table:table-cell>
          <table:table-cell office:value-type="string" calcext:value-type="string">
            <text:p>おかだいぞう</text:p>
          </table:table-cell>
          <table:table-cell office:value-type="string" calcext:value-type="string">
            <text:p>発展する医療デッキ</text:p>
          </table:table-cell>
          <table:table-cell table:formula="of:=VLOOKUP([.G220];[$収録番号.$A$1:$収録番号.$B$9];2;0)" office:value-type="float" office:value="30" calcext:value-type="float">
            <text:p>30</text:p>
          </table:table-cell>
          <table:table-cell office:value-type="string" calcext:value-type="string">
            <text:p>N</text:p>
          </table:table-cell>
          <table:table-cell table:formula="of:=VLOOKUP([.I220];[$レアリティ番号.$A$1:$レアリティ番号.$B$4];2;0)" office:value-type="float" office:value="1" calcext:value-type="float">
            <text:p>1</text:p>
          </table:table-cell>
          <table:table-cell office:value-type="string" calcext:value-type="string">
            <text:p>イジン</text:p>
          </table:table-cell>
          <table:table-cell table:formula="of:=VLOOKUP([.K220];[$種類番号.$A$1:$種類番号.$B$4];2;0)" office:value-type="float" office:value="1" calcext:value-type="float">
            <text:p>1</text:p>
          </table:table-cell>
          <table:table-cell office:value-type="string" calcext:value-type="string">
            <text:p>紫</text:p>
          </table:table-cell>
          <table:table-cell table:formula="of:=VLOOKUP([.M220];[$色番号.$A$1:$色番号.$B$10];2;0)" office:value-type="float" office:value="16" calcext:value-type="float">
            <text:p>16</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20];[$能力語番号.$A$1:$能力語番号.$B$10];2;0);0)" office:value-type="float" office:value="0" calcext:value-type="float">
            <text:p>0</text:p>
          </table:table-cell>
          <table:table-cell office:value-type="string" calcext:value-type="string">
            <text:p>剣術</text:p>
          </table:table-cell>
          <table:table-cell table:formula="of:=IFERROR(VLOOKUP([.$S220];[$特性番号.$A$1:$特性番号.$B$8];2;0);0)" office:value-type="float" office:value="1" calcext:value-type="float">
            <text:p>1</text:p>
          </table:table-cell>
          <table:table-cell office:value-type="string" calcext:value-type="string">
            <text:p>即応¶相手の墓地のイジン1体につき「パワー+2000」を得る。¶パワー6000以上の間「寝たとき、イジンかガーディアンを1体を破壊する」を得る。</text:p>
          </table:table-cell>
          <table:table-cell table:formula="of:=NA()" office:value-type="string" office:string-value="" calcext:value-type="error">
            <text:p>#N/A</text:p>
          </table:table-cell>
          <table:table-cell table:formula="of:=IFERROR(VLOOKUP([.$V220];[$遺業能力番号.$A$1:$遺業能力番号.$B$9];2;0);0)" office:value-type="float" office:value="0" calcext:value-type="float">
            <text:p>0</text:p>
          </table:table-cell>
          <table:table-cell office:value-type="string" calcext:value-type="string">
            <text:p>https://one-draw.jp/ijinden/cardlist/P01/card/03_P_007.png</text:p>
          </table:table-cell>
          <table:table-cell table:formula="of:=CONCATENATE([$JSON.$A$1];[.$C220];[$JSON.$B$1];[.$E220];[$JSON.$C$1];[.$F220];[$JSON.$D$1];IF(ISNA([.$S220]);&quot;null&quot;;&quot;&quot;&quot;&quot;&amp;[.$S220]&amp;&quot;&quot;&quot;&quot;);[$JSON.$E$1];[.$U220];[$JSON.$F$1];IF(ISNA([.$V220]);&quot;null&quot;;&quot;&quot;&quot;&quot;&amp;[.$V220]&amp;&quot;&quot;&quot;&quot;);[$JSON.$G$1];[.$X220];[$JSON.$H$1];[.$H220];[$JSON.$I$1];[.J220];[$JSON.$J$1];[.$L220];[$JSON.$K$1];[.$O220];[$JSON.$L$1];[.$N220];[$JSON.$M$1];[.$R220];[$JSON.$N$1];[.$T220];[$JSON.$O$1];[.$W220];[$JSON.$P$1];[.$A220];[$JSON.$Q$1];[.$B220];[$JSON.$R$1])" office:value-type="string" office:string-value="{&quot;id&quot;:&quot;P-7&quot;,&quot;name&quot;:&quot;岡田以蔵&quot;,&quot;kana&quot;:&quot;おかだいぞう&quot;,&quot;traitText&quot;:&quot;剣術&quot;,&quot;ruleText&quot;:&quot;即応¶相手の墓地のイジン1体につき「パワー+2000」を得る。¶パワー6000以上の間「寝たとき、イジンかガーディアンを1体を破壊する」を得る。&quot;,&quot;legacyText&quot;:null,&quot;imageUrl&quot;:&quot;https://one-draw.jp/ijinden/cardlist/P01/card/03_P_007.png&quot;,&quot;expansion&quot;:30,&quot;rarity&quot;:1,&quot;type&quot;:1,&quot;level&quot;:5,&quot;color&quot;:16,&quot;term&quot;:0,&quot;trait&quot;:1,&quot;legacy&quot;:0,&quot;orderTable&quot;:219,&quot;orderDeck&quot;:177}," calcext:value-type="string">
            <text:p>{"id":"P-7","name":"岡田以蔵","kana":"おかだいぞう","traitText":"剣術","ruleText":"即応¶相手の墓地のイジン1体につき「パワー+2000」を得る。¶パワー6000以上の間「寝たとき、イジンかガーディアンを1体を破壊する」を得る。","legacyText":null,"imageUrl":"https://one-draw.jp/ijinden/cardlist/P01/card/03_P_007.png","expansion":30,"rarity":1,"type":1,"level":5,"color":16,"term":0,"trait":1,"legacy":0,"orderTable":219,"orderDeck":177},</text:p>
          </table:table-cell>
          <table:table-cell table:number-columns-repeated="16347"/>
        </table:table-row>
        <table:table-row table:style-name="ro2">
          <table:table-cell office:value-type="float" office:value="220" calcext:value-type="float">
            <text:p>220</text:p>
          </table:table-cell>
          <table:table-cell office:value-type="float" office:value="102" calcext:value-type="float">
            <text:p>102</text:p>
          </table:table-cell>
          <table:table-cell office:value-type="string" calcext:value-type="string">
            <text:p>P-8</text:p>
          </table:table-cell>
          <table:table-cell office:value-type="float" office:value="8" calcext:value-type="float">
            <text:p>8</text:p>
          </table:table-cell>
          <table:table-cell office:value-type="string" calcext:value-type="string">
            <text:p>クララ・バートン</text:p>
          </table:table-cell>
          <table:table-cell office:value-type="string" calcext:value-type="string">
            <text:p>くららばーとん</text:p>
          </table:table-cell>
          <table:table-cell office:value-type="string" calcext:value-type="string">
            <text:p>発展する医療デッキ</text:p>
          </table:table-cell>
          <table:table-cell table:formula="of:=VLOOKUP([.G221];[$収録番号.$A$1:$収録番号.$B$9];2;0)" office:value-type="float" office:value="30" calcext:value-type="float">
            <text:p>30</text:p>
          </table:table-cell>
          <table:table-cell office:value-type="string" calcext:value-type="string">
            <text:p>N</text:p>
          </table:table-cell>
          <table:table-cell table:formula="of:=VLOOKUP([.I221];[$レアリティ番号.$A$1:$レアリティ番号.$B$4];2;0)" office:value-type="float" office:value="1" calcext:value-type="float">
            <text:p>1</text:p>
          </table:table-cell>
          <table:table-cell office:value-type="string" calcext:value-type="string">
            <text:p>イジン</text:p>
          </table:table-cell>
          <table:table-cell table:formula="of:=VLOOKUP([.K221];[$種類番号.$A$1:$種類番号.$B$4];2;0)" office:value-type="float" office:value="1" calcext:value-type="float">
            <text:p>1</text:p>
          </table:table-cell>
          <table:table-cell office:value-type="string" calcext:value-type="string">
            <text:p>紫</text:p>
          </table:table-cell>
          <table:table-cell table:formula="of:=VLOOKUP([.M221];[$色番号.$A$1:$色番号.$B$10];2;0)" office:value-type="float" office:value="16" calcext:value-type="float">
            <text:p>16</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21];[$能力語番号.$A$1:$能力語番号.$B$10];2;0);0)" office:value-type="float" office:value="0" calcext:value-type="float">
            <text:p>0</text:p>
          </table:table-cell>
          <table:table-cell office:value-type="string" calcext:value-type="string">
            <text:p>医術</text:p>
          </table:table-cell>
          <table:table-cell table:formula="of:=IFERROR(VLOOKUP([.$S221];[$特性番号.$A$1:$特性番号.$B$8];2;0);0)" office:value-type="float" office:value="16" calcext:value-type="float">
            <text:p>16</text:p>
          </table:table-cell>
          <table:table-cell office:value-type="string" calcext:value-type="string">
            <text:p>戦場のカードが破壊されたとき、自分の魔力ゾーンのマリョク1つを裏にして、破壊されているカード1つを指定して発動できる。その破壊されているカードを手札に戻す。</text:p>
          </table:table-cell>
          <table:table-cell table:formula="of:=NA()" office:value-type="string" office:string-value="" calcext:value-type="error">
            <text:p>#N/A</text:p>
          </table:table-cell>
          <table:table-cell table:formula="of:=IFERROR(VLOOKUP([.$V221];[$遺業能力番号.$A$1:$遺業能力番号.$B$9];2;0);0)" office:value-type="float" office:value="0" calcext:value-type="float">
            <text:p>0</text:p>
          </table:table-cell>
          <table:table-cell office:value-type="string" calcext:value-type="string">
            <text:p>https://one-draw.jp/ijinden/cardlist/P01/card/03_P_008.png</text:p>
          </table:table-cell>
          <table:table-cell table:formula="of:=CONCATENATE([$JSON.$A$1];[.$C221];[$JSON.$B$1];[.$E221];[$JSON.$C$1];[.$F221];[$JSON.$D$1];IF(ISNA([.$S221]);&quot;null&quot;;&quot;&quot;&quot;&quot;&amp;[.$S221]&amp;&quot;&quot;&quot;&quot;);[$JSON.$E$1];[.$U221];[$JSON.$F$1];IF(ISNA([.$V221]);&quot;null&quot;;&quot;&quot;&quot;&quot;&amp;[.$V221]&amp;&quot;&quot;&quot;&quot;);[$JSON.$G$1];[.$X221];[$JSON.$H$1];[.$H221];[$JSON.$I$1];[.J221];[$JSON.$J$1];[.$L221];[$JSON.$K$1];[.$O221];[$JSON.$L$1];[.$N221];[$JSON.$M$1];[.$R221];[$JSON.$N$1];[.$T221];[$JSON.$O$1];[.$W221];[$JSON.$P$1];[.$A221];[$JSON.$Q$1];[.$B221];[$JSON.$R$1])" office:value-type="string" office:string-value="{&quot;id&quot;:&quot;P-8&quot;,&quot;name&quot;:&quot;クララ・バートン&quot;,&quot;kana&quot;:&quot;くららばーとん&quot;,&quot;traitText&quot;:&quot;医術&quot;,&quot;ruleText&quot;:&quot;戦場のカードが破壊されたとき、自分の魔力ゾーンのマリョク1つを裏にして、破壊されているカード1つを指定して発動できる。その破壊されているカードを手札に戻す。&quot;,&quot;legacyText&quot;:null,&quot;imageUrl&quot;:&quot;https://one-draw.jp/ijinden/cardlist/P01/card/03_P_008.png&quot;,&quot;expansion&quot;:30,&quot;rarity&quot;:1,&quot;type&quot;:1,&quot;level&quot;:3,&quot;color&quot;:16,&quot;term&quot;:0,&quot;trait&quot;:16,&quot;legacy&quot;:0,&quot;orderTable&quot;:220,&quot;orderDeck&quot;:102}," calcext:value-type="string">
            <text:p>{"id":"P-8","name":"クララ・バートン","kana":"くららばーとん","traitText":"医術","ruleText":"戦場のカードが破壊されたとき、自分の魔力ゾーンのマリョク1つを裏にして、破壊されているカード1つを指定して発動できる。その破壊されているカードを手札に戻す。","legacyText":null,"imageUrl":"https://one-draw.jp/ijinden/cardlist/P01/card/03_P_008.png","expansion":30,"rarity":1,"type":1,"level":3,"color":16,"term":0,"trait":16,"legacy":0,"orderTable":220,"orderDeck":102},</text:p>
          </table:table-cell>
          <table:table-cell table:number-columns-repeated="16347"/>
        </table:table-row>
        <table:table-row table:style-name="ro2">
          <table:table-cell office:value-type="float" office:value="221" calcext:value-type="float">
            <text:p>221</text:p>
          </table:table-cell>
          <table:table-cell office:value-type="float" office:value="277" calcext:value-type="float">
            <text:p>277</text:p>
          </table:table-cell>
          <table:table-cell office:value-type="string" calcext:value-type="string">
            <text:p>P-9</text:p>
          </table:table-cell>
          <table:table-cell office:value-type="float" office:value="9" calcext:value-type="float">
            <text:p>9</text:p>
          </table:table-cell>
          <table:table-cell office:value-type="string" calcext:value-type="string">
            <text:p>虎狼痢</text:p>
          </table:table-cell>
          <table:table-cell office:value-type="string" calcext:value-type="string">
            <text:p>ころり</text:p>
          </table:table-cell>
          <table:table-cell office:value-type="string" calcext:value-type="string">
            <text:p>発展する医療デッキ</text:p>
          </table:table-cell>
          <table:table-cell table:formula="of:=VLOOKUP([.G222];[$収録番号.$A$1:$収録番号.$B$9];2;0)" office:value-type="float" office:value="30" calcext:value-type="float">
            <text:p>30</text:p>
          </table:table-cell>
          <table:table-cell office:value-type="string" calcext:value-type="string">
            <text:p>N</text:p>
          </table:table-cell>
          <table:table-cell table:formula="of:=VLOOKUP([.I222];[$レアリティ番号.$A$1:$レアリティ番号.$B$4];2;0)" office:value-type="float" office:value="1" calcext:value-type="float">
            <text:p>1</text:p>
          </table:table-cell>
          <table:table-cell office:value-type="string" calcext:value-type="string">
            <text:p>ハイケイ</text:p>
          </table:table-cell>
          <table:table-cell table:formula="of:=VLOOKUP([.K222];[$種類番号.$A$1:$種類番号.$B$4];2;0)" office:value-type="float" office:value="2" calcext:value-type="float">
            <text:p>2</text:p>
          </table:table-cell>
          <table:table-cell office:value-type="string" calcext:value-type="string">
            <text:p>紫</text:p>
          </table:table-cell>
          <table:table-cell table:formula="of:=VLOOKUP([.M222];[$色番号.$A$1:$色番号.$B$10];2;0)" office:value-type="float" office:value="16" calcext:value-type="float">
            <text:p>16</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2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22];[$特性番号.$A$1:$特性番号.$B$8];2;0);0)" office:value-type="float" office:value="0" calcext:value-type="float">
            <text:p>0</text:p>
          </table:table-cell>
          <table:table-cell office:value-type="string" calcext:value-type="string">
            <text:p>この能力は、自分の手札が0枚でも、相手の手札が0枚でも発動しない。能力によって手札から墓地にカードが置かれたときに発動できる。自分は自分の手札のカード1つを、相手は相手の手札のカード1つを同時に見せて、レベルが高い方のカードを墓地に置いて、低い方のカードを山札の上に戻す。</text:p>
          </table:table-cell>
          <table:table-cell office:value-type="string" calcext:value-type="string">
            <text:p>手札に戻す</text:p>
          </table:table-cell>
          <table:table-cell table:formula="of:=IFERROR(VLOOKUP([.$V222];[$遺業能力番号.$A$1:$遺業能力番号.$B$9];2;0);0)" office:value-type="float" office:value="5" calcext:value-type="float">
            <text:p>5</text:p>
          </table:table-cell>
          <table:table-cell office:value-type="string" calcext:value-type="string">
            <text:p>https://one-draw.jp/ijinden/cardlist/P01/card/03_P_009.png</text:p>
          </table:table-cell>
          <table:table-cell table:formula="of:=CONCATENATE([$JSON.$A$1];[.$C222];[$JSON.$B$1];[.$E222];[$JSON.$C$1];[.$F222];[$JSON.$D$1];IF(ISNA([.$S222]);&quot;null&quot;;&quot;&quot;&quot;&quot;&amp;[.$S222]&amp;&quot;&quot;&quot;&quot;);[$JSON.$E$1];[.$U222];[$JSON.$F$1];IF(ISNA([.$V222]);&quot;null&quot;;&quot;&quot;&quot;&quot;&amp;[.$V222]&amp;&quot;&quot;&quot;&quot;);[$JSON.$G$1];[.$X222];[$JSON.$H$1];[.$H222];[$JSON.$I$1];[.J222];[$JSON.$J$1];[.$L222];[$JSON.$K$1];[.$O222];[$JSON.$L$1];[.$N222];[$JSON.$M$1];[.$R222];[$JSON.$N$1];[.$T222];[$JSON.$O$1];[.$W222];[$JSON.$P$1];[.$A222];[$JSON.$Q$1];[.$B222];[$JSON.$R$1])" office:value-type="string" office:string-value="{&quot;id&quot;:&quot;P-9&quot;,&quot;name&quot;:&quot;虎狼痢&quot;,&quot;kana&quot;:&quot;ころり&quot;,&quot;traitText&quot;:null,&quot;ruleText&quot;:&quot;この能力は、自分の手札が0枚でも、相手の手札が0枚でも発動しない。能力によって手札から墓地にカードが置かれたときに発動できる。自分は自分の手札のカード1つを、相手は相手の手札のカード1つを同時に見せて、レベルが高い方のカードを墓地に置いて、低い方のカードを山札の上に戻す。&quot;,&quot;legacyText&quot;:&quot;手札に戻す&quot;,&quot;imageUrl&quot;:&quot;https://one-draw.jp/ijinden/cardlist/P01/card/03_P_009.png&quot;,&quot;expansion&quot;:30,&quot;rarity&quot;:1,&quot;type&quot;:2,&quot;level&quot;:6,&quot;color&quot;:16,&quot;term&quot;:0,&quot;trait&quot;:0,&quot;legacy&quot;:5,&quot;orderTable&quot;:221,&quot;orderDeck&quot;:277}," calcext:value-type="string">
            <text:p>{"id":"P-9","name":"虎狼痢","kana":"ころり","traitText":null,"ruleText":"この能力は、自分の手札が0枚でも、相手の手札が0枚でも発動しない。能力によって手札から墓地にカードが置かれたときに発動できる。自分は自分の手札のカード1つを、相手は相手の手札のカード1つを同時に見せて、レベルが高い方のカードを墓地に置いて、低い方のカードを山札の上に戻す。","legacyText":"手札に戻す","imageUrl":"https://one-draw.jp/ijinden/cardlist/P01/card/03_P_009.png","expansion":30,"rarity":1,"type":2,"level":6,"color":16,"term":0,"trait":0,"legacy":5,"orderTable":221,"orderDeck":277},</text:p>
          </table:table-cell>
          <table:table-cell table:number-columns-repeated="16347"/>
        </table:table-row>
        <table:table-row table:style-name="ro2">
          <table:table-cell office:value-type="float" office:value="222" calcext:value-type="float">
            <text:p>222</text:p>
          </table:table-cell>
          <table:table-cell office:value-type="float" office:value="271" calcext:value-type="float">
            <text:p>271</text:p>
          </table:table-cell>
          <table:table-cell office:value-type="string" calcext:value-type="string">
            <text:p>P-10</text:p>
          </table:table-cell>
          <table:table-cell office:value-type="float" office:value="10" calcext:value-type="float">
            <text:p>10</text:p>
          </table:table-cell>
          <table:table-cell office:value-type="string" calcext:value-type="string">
            <text:p>浪士集う長屋</text:p>
          </table:table-cell>
          <table:table-cell office:value-type="string" calcext:value-type="string">
            <text:p>ろうしつどうながや</text:p>
          </table:table-cell>
          <table:table-cell office:value-type="string" calcext:value-type="string">
            <text:p>発展する医療デッキ</text:p>
          </table:table-cell>
          <table:table-cell table:formula="of:=VLOOKUP([.G223];[$収録番号.$A$1:$収録番号.$B$9];2;0)" office:value-type="float" office:value="30" calcext:value-type="float">
            <text:p>30</text:p>
          </table:table-cell>
          <table:table-cell office:value-type="string" calcext:value-type="string">
            <text:p>N</text:p>
          </table:table-cell>
          <table:table-cell table:formula="of:=VLOOKUP([.I223];[$レアリティ番号.$A$1:$レアリティ番号.$B$4];2;0)" office:value-type="float" office:value="1" calcext:value-type="float">
            <text:p>1</text:p>
          </table:table-cell>
          <table:table-cell office:value-type="string" calcext:value-type="string">
            <text:p>ハイケイ</text:p>
          </table:table-cell>
          <table:table-cell table:formula="of:=VLOOKUP([.K223];[$種類番号.$A$1:$種類番号.$B$4];2;0)" office:value-type="float" office:value="2" calcext:value-type="float">
            <text:p>2</text:p>
          </table:table-cell>
          <table:table-cell office:value-type="string" calcext:value-type="string">
            <text:p>紫</text:p>
          </table:table-cell>
          <table:table-cell table:formula="of:=VLOOKUP([.M223];[$色番号.$A$1:$色番号.$B$10];2;0)" office:value-type="float" office:value="16" calcext:value-type="float">
            <text:p>16</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2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23];[$特性番号.$A$1:$特性番号.$B$8];2;0);0)" office:value-type="float" office:value="0" calcext:value-type="float">
            <text:p>0</text:p>
          </table:table-cell>
          <table:table-cell office:value-type="string" calcext:value-type="string">
            <text:p>自分のメインフェイズが開始したとき、自分の山札の上から3枚までを墓地に置いてもよい。1枚以上を墓地に置いたなら、マリョク配置権+1する。2枚以上を墓地に置いたなら、さらにイジン召喚権+1する。3枚を墓地に置いたなら、さらに1ドローする。</text:p>
          </table:table-cell>
          <table:table-cell table:formula="of:=NA()" office:value-type="string" office:string-value="" calcext:value-type="error">
            <text:p>#N/A</text:p>
          </table:table-cell>
          <table:table-cell table:formula="of:=IFERROR(VLOOKUP([.$V223];[$遺業能力番号.$A$1:$遺業能力番号.$B$9];2;0);0)" office:value-type="float" office:value="0" calcext:value-type="float">
            <text:p>0</text:p>
          </table:table-cell>
          <table:table-cell office:value-type="string" calcext:value-type="string">
            <text:p>https://one-draw.jp/ijinden/cardlist/P01/card/03_P_010.png</text:p>
          </table:table-cell>
          <table:table-cell table:formula="of:=CONCATENATE([$JSON.$A$1];[.$C223];[$JSON.$B$1];[.$E223];[$JSON.$C$1];[.$F223];[$JSON.$D$1];IF(ISNA([.$S223]);&quot;null&quot;;&quot;&quot;&quot;&quot;&amp;[.$S223]&amp;&quot;&quot;&quot;&quot;);[$JSON.$E$1];[.$U223];[$JSON.$F$1];IF(ISNA([.$V223]);&quot;null&quot;;&quot;&quot;&quot;&quot;&amp;[.$V223]&amp;&quot;&quot;&quot;&quot;);[$JSON.$G$1];[.$X223];[$JSON.$H$1];[.$H223];[$JSON.$I$1];[.J223];[$JSON.$J$1];[.$L223];[$JSON.$K$1];[.$O223];[$JSON.$L$1];[.$N223];[$JSON.$M$1];[.$R223];[$JSON.$N$1];[.$T223];[$JSON.$O$1];[.$W223];[$JSON.$P$1];[.$A223];[$JSON.$Q$1];[.$B223];[$JSON.$R$1])" office:value-type="string" office:string-value="{&quot;id&quot;:&quot;P-10&quot;,&quot;name&quot;:&quot;浪士集う長屋&quot;,&quot;kana&quot;:&quot;ろうしつどうながや&quot;,&quot;traitText&quot;:null,&quot;ruleText&quot;:&quot;自分のメインフェイズが開始したとき、自分の山札の上から3枚までを墓地に置いてもよい。1枚以上を墓地に置いたなら、マリョク配置権+1する。2枚以上を墓地に置いたなら、さらにイジン召喚権+1する。3枚を墓地に置いたなら、さらに1ドローする。&quot;,&quot;legacyText&quot;:null,&quot;imageUrl&quot;:&quot;https://one-draw.jp/ijinden/cardlist/P01/card/03_P_010.png&quot;,&quot;expansion&quot;:30,&quot;rarity&quot;:1,&quot;type&quot;:2,&quot;level&quot;:5,&quot;color&quot;:16,&quot;term&quot;:0,&quot;trait&quot;:0,&quot;legacy&quot;:0,&quot;orderTable&quot;:222,&quot;orderDeck&quot;:271}," calcext:value-type="string">
            <text:p>{"id":"P-10","name":"浪士集う長屋","kana":"ろうしつどうながや","traitText":null,"ruleText":"自分のメインフェイズが開始したとき、自分の山札の上から3枚までを墓地に置いてもよい。1枚以上を墓地に置いたなら、マリョク配置権+1する。2枚以上を墓地に置いたなら、さらにイジン召喚権+1する。3枚を墓地に置いたなら、さらに1ドローする。","legacyText":null,"imageUrl":"https://one-draw.jp/ijinden/cardlist/P01/card/03_P_010.png","expansion":30,"rarity":1,"type":2,"level":5,"color":16,"term":0,"trait":0,"legacy":0,"orderTable":222,"orderDeck":271},</text:p>
          </table:table-cell>
          <table:table-cell table:number-columns-repeated="16347"/>
        </table:table-row>
        <table:table-row table:style-name="ro2">
          <table:table-cell office:value-type="float" office:value="223" calcext:value-type="float">
            <text:p>223</text:p>
          </table:table-cell>
          <table:table-cell office:value-type="float" office:value="286" calcext:value-type="float">
            <text:p>286</text:p>
          </table:table-cell>
          <table:table-cell office:value-type="string" calcext:value-type="string">
            <text:p>P-11</text:p>
          </table:table-cell>
          <table:table-cell office:value-type="float" office:value="11" calcext:value-type="float">
            <text:p>11</text:p>
          </table:table-cell>
          <table:table-cell office:value-type="string" calcext:value-type="string">
            <text:p>スピリットアウェイ</text:p>
          </table:table-cell>
          <table:table-cell office:value-type="string" calcext:value-type="string">
            <text:p>すぴりっとあうぇい</text:p>
          </table:table-cell>
          <table:table-cell office:value-type="string" calcext:value-type="string">
            <text:p>発展する医療デッキ</text:p>
          </table:table-cell>
          <table:table-cell table:formula="of:=VLOOKUP([.G224];[$収録番号.$A$1:$収録番号.$B$9];2;0)" office:value-type="float" office:value="30" calcext:value-type="float">
            <text:p>30</text:p>
          </table:table-cell>
          <table:table-cell office:value-type="string" calcext:value-type="string">
            <text:p>N</text:p>
          </table:table-cell>
          <table:table-cell table:formula="of:=VLOOKUP([.I224];[$レアリティ番号.$A$1:$レアリティ番号.$B$4];2;0)" office:value-type="float" office:value="1" calcext:value-type="float">
            <text:p>1</text:p>
          </table:table-cell>
          <table:table-cell office:value-type="string" calcext:value-type="string">
            <text:p>マホウ</text:p>
          </table:table-cell>
          <table:table-cell table:formula="of:=VLOOKUP([.K224];[$種類番号.$A$1:$種類番号.$B$4];2;0)" office:value-type="float" office:value="3" calcext:value-type="float">
            <text:p>3</text:p>
          </table:table-cell>
          <table:table-cell office:value-type="string" calcext:value-type="string">
            <text:p>紫</text:p>
          </table:table-cell>
          <table:table-cell table:formula="of:=VLOOKUP([.M224];[$色番号.$A$1:$色番号.$B$10];2;0)" office:value-type="float" office:value="16" calcext:value-type="float">
            <text:p>16</text:p>
          </table:table-cell>
          <table:table-cell table:number-columns-repeated="2" office:value-type="float" office:value="1" calcext:value-type="float">
            <text:p>1</text:p>
          </table:table-cell>
          <table:table-cell table:formula="of:=NA()" office:value-type="string" office:string-value="" calcext:value-type="error">
            <text:p>#N/A</text:p>
          </table:table-cell>
          <table:table-cell table:formula="of:=IFERROR(VLOOKUP([.$Q22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24];[$特性番号.$A$1:$特性番号.$B$8];2;0);0)" office:value-type="float" office:value="0" calcext:value-type="float">
            <text:p>0</text:p>
          </table:table-cell>
          <table:table-cell office:value-type="string" calcext:value-type="string">
            <text:p>自分の戦場のガーディアン1体を手札に戻して、相手の山札の上から2枚を墓地に置いて、マリョク配置権+1する。</text:p>
          </table:table-cell>
          <table:table-cell office:value-type="string" calcext:value-type="string">
            <text:p>魔力化</text:p>
          </table:table-cell>
          <table:table-cell table:formula="of:=IFERROR(VLOOKUP([.$V224];[$遺業能力番号.$A$1:$遺業能力番号.$B$9];2;0);0)" office:value-type="float" office:value="1" calcext:value-type="float">
            <text:p>1</text:p>
          </table:table-cell>
          <table:table-cell office:value-type="string" calcext:value-type="string">
            <text:p>https://one-draw.jp/ijinden/cardlist/P01/card/03_P_011.png</text:p>
          </table:table-cell>
          <table:table-cell table:formula="of:=CONCATENATE([$JSON.$A$1];[.$C224];[$JSON.$B$1];[.$E224];[$JSON.$C$1];[.$F224];[$JSON.$D$1];IF(ISNA([.$S224]);&quot;null&quot;;&quot;&quot;&quot;&quot;&amp;[.$S224]&amp;&quot;&quot;&quot;&quot;);[$JSON.$E$1];[.$U224];[$JSON.$F$1];IF(ISNA([.$V224]);&quot;null&quot;;&quot;&quot;&quot;&quot;&amp;[.$V224]&amp;&quot;&quot;&quot;&quot;);[$JSON.$G$1];[.$X224];[$JSON.$H$1];[.$H224];[$JSON.$I$1];[.J224];[$JSON.$J$1];[.$L224];[$JSON.$K$1];[.$O224];[$JSON.$L$1];[.$N224];[$JSON.$M$1];[.$R224];[$JSON.$N$1];[.$T224];[$JSON.$O$1];[.$W224];[$JSON.$P$1];[.$A224];[$JSON.$Q$1];[.$B224];[$JSON.$R$1])" office:value-type="string" office:string-value="{&quot;id&quot;:&quot;P-11&quot;,&quot;name&quot;:&quot;スピリットアウェイ&quot;,&quot;kana&quot;:&quot;すぴりっとあうぇい&quot;,&quot;traitText&quot;:null,&quot;ruleText&quot;:&quot;自分の戦場のガーディアン1体を手札に戻して、相手の山札の上から2枚を墓地に置いて、マリョク配置権+1する。&quot;,&quot;legacyText&quot;:&quot;魔力化&quot;,&quot;imageUrl&quot;:&quot;https://one-draw.jp/ijinden/cardlist/P01/card/03_P_011.png&quot;,&quot;expansion&quot;:30,&quot;rarity&quot;:1,&quot;type&quot;:3,&quot;level&quot;:1,&quot;color&quot;:16,&quot;term&quot;:0,&quot;trait&quot;:0,&quot;legacy&quot;:1,&quot;orderTable&quot;:223,&quot;orderDeck&quot;:286}," calcext:value-type="string">
            <text:p>{"id":"P-11","name":"スピリットアウェイ","kana":"すぴりっとあうぇい","traitText":null,"ruleText":"自分の戦場のガーディアン1体を手札に戻して、相手の山札の上から2枚を墓地に置いて、マリョク配置権+1する。","legacyText":"魔力化","imageUrl":"https://one-draw.jp/ijinden/cardlist/P01/card/03_P_011.png","expansion":30,"rarity":1,"type":3,"level":1,"color":16,"term":0,"trait":0,"legacy":1,"orderTable":223,"orderDeck":286},</text:p>
          </table:table-cell>
          <table:table-cell table:number-columns-repeated="16347"/>
        </table:table-row>
        <table:table-row table:style-name="ro2">
          <table:table-cell office:value-type="float" office:value="224" calcext:value-type="float">
            <text:p>224</text:p>
          </table:table-cell>
          <table:table-cell office:value-type="float" office:value="324" calcext:value-type="float">
            <text:p>324</text:p>
          </table:table-cell>
          <table:table-cell office:value-type="string" calcext:value-type="string">
            <text:p>P-12</text:p>
          </table:table-cell>
          <table:table-cell office:value-type="float" office:value="12" calcext:value-type="float">
            <text:p>12</text:p>
          </table:table-cell>
          <table:table-cell office:value-type="string" calcext:value-type="string">
            <text:p>タイムディレイション</text:p>
          </table:table-cell>
          <table:table-cell office:value-type="string" calcext:value-type="string">
            <text:p>たいむでぃれいしょん</text:p>
          </table:table-cell>
          <table:table-cell office:value-type="string" calcext:value-type="string">
            <text:p>発展する医療デッキ</text:p>
          </table:table-cell>
          <table:table-cell table:formula="of:=VLOOKUP([.G225];[$収録番号.$A$1:$収録番号.$B$9];2;0)" office:value-type="float" office:value="30" calcext:value-type="float">
            <text:p>30</text:p>
          </table:table-cell>
          <table:table-cell office:value-type="string" calcext:value-type="string">
            <text:p>N</text:p>
          </table:table-cell>
          <table:table-cell table:formula="of:=VLOOKUP([.I225];[$レアリティ番号.$A$1:$レアリティ番号.$B$4];2;0)" office:value-type="float" office:value="1" calcext:value-type="float">
            <text:p>1</text:p>
          </table:table-cell>
          <table:table-cell office:value-type="string" calcext:value-type="string">
            <text:p>マホウ</text:p>
          </table:table-cell>
          <table:table-cell table:formula="of:=VLOOKUP([.K225];[$種類番号.$A$1:$種類番号.$B$4];2;0)" office:value-type="float" office:value="3" calcext:value-type="float">
            <text:p>3</text:p>
          </table:table-cell>
          <table:table-cell office:value-type="string" calcext:value-type="string">
            <text:p>紫</text:p>
          </table:table-cell>
          <table:table-cell table:formula="of:=VLOOKUP([.M225];[$色番号.$A$1:$色番号.$B$10];2;0)" office:value-type="float" office:value="16" calcext:value-type="float">
            <text:p>16</text:p>
          </table:table-cell>
          <table:table-cell office:value-type="float" office:value="4" calcext:value-type="float">
            <text:p>4</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Q22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25];[$特性番号.$A$1:$特性番号.$B$8];2;0);0)" office:value-type="float" office:value="0" calcext:value-type="float">
            <text:p>0</text:p>
          </table:table-cell>
          <table:table-cell office:value-type="string" calcext:value-type="string">
            <text:p>これを裏にして魔力ゾーンに置く。その後バトルを中断する。ターンプレイヤーは残りのフェイズを行わずにターンを終了する。</text:p>
          </table:table-cell>
          <table:table-cell office:value-type="string" calcext:value-type="string">
            <text:p>冥府発動</text:p>
          </table:table-cell>
          <table:table-cell table:formula="of:=IFERROR(VLOOKUP([.$V225];[$遺業能力番号.$A$1:$遺業能力番号.$B$9];2;0);0)" office:value-type="float" office:value="2" calcext:value-type="float">
            <text:p>2</text:p>
          </table:table-cell>
          <table:table-cell office:value-type="string" calcext:value-type="string">
            <text:p>https://one-draw.jp/ijinden/cardlist/P01/card/03_P_012.png</text:p>
          </table:table-cell>
          <table:table-cell table:formula="of:=CONCATENATE([$JSON.$A$1];[.$C225];[$JSON.$B$1];[.$E225];[$JSON.$C$1];[.$F225];[$JSON.$D$1];IF(ISNA([.$S225]);&quot;null&quot;;&quot;&quot;&quot;&quot;&amp;[.$S225]&amp;&quot;&quot;&quot;&quot;);[$JSON.$E$1];[.$U225];[$JSON.$F$1];IF(ISNA([.$V225]);&quot;null&quot;;&quot;&quot;&quot;&quot;&amp;[.$V225]&amp;&quot;&quot;&quot;&quot;);[$JSON.$G$1];[.$X225];[$JSON.$H$1];[.$H225];[$JSON.$I$1];[.J225];[$JSON.$J$1];[.$L225];[$JSON.$K$1];[.$O225];[$JSON.$L$1];[.$N225];[$JSON.$M$1];[.$R225];[$JSON.$N$1];[.$T225];[$JSON.$O$1];[.$W225];[$JSON.$P$1];[.$A225];[$JSON.$Q$1];[.$B225];[$JSON.$R$1])" office:value-type="string" office:string-value="{&quot;id&quot;:&quot;P-12&quot;,&quot;name&quot;:&quot;タイムディレイション&quot;,&quot;kana&quot;:&quot;たいむでぃれいしょん&quot;,&quot;traitText&quot;:null,&quot;ruleText&quot;:&quot;これを裏にして魔力ゾーンに置く。その後バトルを中断する。ターンプレイヤーは残りのフェイズを行わずにターンを終了する。&quot;,&quot;legacyText&quot;:&quot;冥府発動&quot;,&quot;imageUrl&quot;:&quot;https://one-draw.jp/ijinden/cardlist/P01/card/03_P_012.png&quot;,&quot;expansion&quot;:30,&quot;rarity&quot;:1,&quot;type&quot;:3,&quot;level&quot;:4,&quot;color&quot;:16,&quot;term&quot;:0,&quot;trait&quot;:0,&quot;legacy&quot;:2,&quot;orderTable&quot;:224,&quot;orderDeck&quot;:324}," calcext:value-type="string">
            <text:p>{"id":"P-12","name":"タイムディレイション","kana":"たいむでぃれいしょん","traitText":null,"ruleText":"これを裏にして魔力ゾーンに置く。その後バトルを中断する。ターンプレイヤーは残りのフェイズを行わずにターンを終了する。","legacyText":"冥府発動","imageUrl":"https://one-draw.jp/ijinden/cardlist/P01/card/03_P_012.png","expansion":30,"rarity":1,"type":3,"level":4,"color":16,"term":0,"trait":0,"legacy":2,"orderTable":224,"orderDeck":324},</text:p>
          </table:table-cell>
          <table:table-cell table:number-columns-repeated="16347"/>
        </table:table-row>
        <table:table-row table:style-name="ro2">
          <table:table-cell office:value-type="float" office:value="225" calcext:value-type="float">
            <text:p>225</text:p>
          </table:table-cell>
          <table:table-cell office:value-type="float" office:value="366" calcext:value-type="float">
            <text:p>366</text:p>
          </table:table-cell>
          <table:table-cell office:value-type="string" calcext:value-type="string">
            <text:p>P-13</text:p>
          </table:table-cell>
          <table:table-cell office:value-type="float" office:value="13" calcext:value-type="float">
            <text:p>13</text:p>
          </table:table-cell>
          <table:table-cell office:value-type="string" calcext:value-type="string">
            <text:p>ハンドミラー</text:p>
          </table:table-cell>
          <table:table-cell office:value-type="string" calcext:value-type="string">
            <text:p>はんどみらー</text:p>
          </table:table-cell>
          <table:table-cell office:value-type="string" calcext:value-type="string">
            <text:p>発展する医療デッキ</text:p>
          </table:table-cell>
          <table:table-cell table:formula="of:=VLOOKUP([.G226];[$収録番号.$A$1:$収録番号.$B$9];2;0)" office:value-type="float" office:value="30" calcext:value-type="float">
            <text:p>30</text:p>
          </table:table-cell>
          <table:table-cell office:value-type="string" calcext:value-type="string">
            <text:p>N</text:p>
          </table:table-cell>
          <table:table-cell table:formula="of:=VLOOKUP([.I226];[$レアリティ番号.$A$1:$レアリティ番号.$B$4];2;0)" office:value-type="float" office:value="1" calcext:value-type="float">
            <text:p>1</text:p>
          </table:table-cell>
          <table:table-cell office:value-type="string" calcext:value-type="string">
            <text:p>マリョク</text:p>
          </table:table-cell>
          <table:table-cell table:formula="of:=VLOOKUP([.K226];[$種類番号.$A$1:$種類番号.$B$4];2;0)" office:value-type="float" office:value="4" calcext:value-type="float">
            <text:p>4</text:p>
          </table:table-cell>
          <table:table-cell office:value-type="string" calcext:value-type="string">
            <text:p>紫</text:p>
          </table:table-cell>
          <table:table-cell table:formula="of:=VLOOKUP([.M226];[$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2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26];[$特性番号.$A$1:$特性番号.$B$8];2;0);0)" office:value-type="float" office:value="0" calcext:value-type="float">
            <text:p>0</text:p>
          </table:table-cell>
          <table:table-cell office:value-type="string" calcext:value-type="string">
            <text:p>魔力ゾーンに置かれたとき、1ドローする。</text:p>
          </table:table-cell>
          <table:table-cell table:formula="of:=NA()" office:value-type="string" office:string-value="" calcext:value-type="error">
            <text:p>#N/A</text:p>
          </table:table-cell>
          <table:table-cell table:formula="of:=IFERROR(VLOOKUP([.$V226];[$遺業能力番号.$A$1:$遺業能力番号.$B$9];2;0);0)" office:value-type="float" office:value="0" calcext:value-type="float">
            <text:p>0</text:p>
          </table:table-cell>
          <table:table-cell office:value-type="string" calcext:value-type="string">
            <text:p>https://one-draw.jp/ijinden/cardlist/P01/card/03_P_013.png</text:p>
          </table:table-cell>
          <table:table-cell table:formula="of:=CONCATENATE([$JSON.$A$1];[.$C226];[$JSON.$B$1];[.$E226];[$JSON.$C$1];[.$F226];[$JSON.$D$1];IF(ISNA([.$S226]);&quot;null&quot;;&quot;&quot;&quot;&quot;&amp;[.$S226]&amp;&quot;&quot;&quot;&quot;);[$JSON.$E$1];[.$U226];[$JSON.$F$1];IF(ISNA([.$V226]);&quot;null&quot;;&quot;&quot;&quot;&quot;&amp;[.$V226]&amp;&quot;&quot;&quot;&quot;);[$JSON.$G$1];[.$X226];[$JSON.$H$1];[.$H226];[$JSON.$I$1];[.J226];[$JSON.$J$1];[.$L226];[$JSON.$K$1];[.$O226];[$JSON.$L$1];[.$N226];[$JSON.$M$1];[.$R226];[$JSON.$N$1];[.$T226];[$JSON.$O$1];[.$W226];[$JSON.$P$1];[.$A226];[$JSON.$Q$1];[.$B226];[$JSON.$R$1])" office:value-type="string" office:string-value="{&quot;id&quot;:&quot;P-13&quot;,&quot;name&quot;:&quot;ハンドミラー&quot;,&quot;kana&quot;:&quot;はんどみらー&quot;,&quot;traitText&quot;:null,&quot;ruleText&quot;:&quot;魔力ゾーンに置かれたとき、1ドローする。&quot;,&quot;legacyText&quot;:null,&quot;imageUrl&quot;:&quot;https://one-draw.jp/ijinden/cardlist/P01/card/03_P_013.png&quot;,&quot;expansion&quot;:30,&quot;rarity&quot;:1,&quot;type&quot;:4,&quot;level&quot;:1,&quot;color&quot;:16,&quot;term&quot;:0,&quot;trait&quot;:0,&quot;legacy&quot;:0,&quot;orderTable&quot;:225,&quot;orderDeck&quot;:366}," calcext:value-type="string">
            <text:p>{"id":"P-13","name":"ハンドミラー","kana":"はんどみらー","traitText":null,"ruleText":"魔力ゾーンに置かれたとき、1ドローする。","legacyText":null,"imageUrl":"https://one-draw.jp/ijinden/cardlist/P01/card/03_P_013.png","expansion":30,"rarity":1,"type":4,"level":1,"color":16,"term":0,"trait":0,"legacy":0,"orderTable":225,"orderDeck":366},</text:p>
          </table:table-cell>
          <table:table-cell table:number-columns-repeated="16347"/>
        </table:table-row>
        <table:table-row table:style-name="ro2">
          <table:table-cell office:value-type="float" office:value="226" calcext:value-type="float">
            <text:p>226</text:p>
          </table:table-cell>
          <table:table-cell office:value-type="float" office:value="367" calcext:value-type="float">
            <text:p>367</text:p>
          </table:table-cell>
          <table:table-cell office:value-type="string" calcext:value-type="string">
            <text:p>P-14</text:p>
          </table:table-cell>
          <table:table-cell office:value-type="float" office:value="14" calcext:value-type="float">
            <text:p>14</text:p>
          </table:table-cell>
          <table:table-cell office:value-type="string" calcext:value-type="string">
            <text:p>ブラックブレイド</text:p>
          </table:table-cell>
          <table:table-cell office:value-type="string" calcext:value-type="string">
            <text:p>ぶらっくぶれいど</text:p>
          </table:table-cell>
          <table:table-cell office:value-type="string" calcext:value-type="string">
            <text:p>発展する医療デッキ</text:p>
          </table:table-cell>
          <table:table-cell table:formula="of:=VLOOKUP([.G227];[$収録番号.$A$1:$収録番号.$B$9];2;0)" office:value-type="float" office:value="30" calcext:value-type="float">
            <text:p>30</text:p>
          </table:table-cell>
          <table:table-cell office:value-type="string" calcext:value-type="string">
            <text:p>N</text:p>
          </table:table-cell>
          <table:table-cell table:formula="of:=VLOOKUP([.I227];[$レアリティ番号.$A$1:$レアリティ番号.$B$4];2;0)" office:value-type="float" office:value="1" calcext:value-type="float">
            <text:p>1</text:p>
          </table:table-cell>
          <table:table-cell office:value-type="string" calcext:value-type="string">
            <text:p>マリョク</text:p>
          </table:table-cell>
          <table:table-cell table:formula="of:=VLOOKUP([.K227];[$種類番号.$A$1:$種類番号.$B$4];2;0)" office:value-type="float" office:value="4" calcext:value-type="float">
            <text:p>4</text:p>
          </table:table-cell>
          <table:table-cell office:value-type="string" calcext:value-type="string">
            <text:p>紫</text:p>
          </table:table-cell>
          <table:table-cell table:formula="of:=VLOOKUP([.M227];[$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2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27];[$特性番号.$A$1:$特性番号.$B$8];2;0);0)" office:value-type="float" office:value="0" calcext:value-type="float">
            <text:p>0</text:p>
          </table:table-cell>
          <table:table-cell office:value-type="string" calcext:value-type="string">
            <text:p>イジン召喚によってイジンが自分の戦場に置かれる際、そのイジンに装備させてもよい。¶装備 : 自分の魔力ゾーンのマリョク1つにつき「パワー+500」を得る。</text:p>
          </table:table-cell>
          <table:table-cell table:style-name="ce8" office:value-type="string" calcext:value-type="string">
            <text:p>復元</text:p>
          </table:table-cell>
          <table:table-cell table:formula="of:=IFERROR(VLOOKUP([.$V227];[$遺業能力番号.$A$1:$遺業能力番号.$B$9];2;0);0)" office:value-type="float" office:value="3" calcext:value-type="float">
            <text:p>3</text:p>
          </table:table-cell>
          <table:table-cell office:value-type="string" calcext:value-type="string">
            <text:p>https://one-draw.jp/ijinden/cardlist/P01/card/03_P_014.png</text:p>
          </table:table-cell>
          <table:table-cell table:formula="of:=CONCATENATE([$JSON.$A$1];[.$C227];[$JSON.$B$1];[.$E227];[$JSON.$C$1];[.$F227];[$JSON.$D$1];IF(ISNA([.$S227]);&quot;null&quot;;&quot;&quot;&quot;&quot;&amp;[.$S227]&amp;&quot;&quot;&quot;&quot;);[$JSON.$E$1];[.$U227];[$JSON.$F$1];IF(ISNA([.$V227]);&quot;null&quot;;&quot;&quot;&quot;&quot;&amp;[.$V227]&amp;&quot;&quot;&quot;&quot;);[$JSON.$G$1];[.$X227];[$JSON.$H$1];[.$H227];[$JSON.$I$1];[.J227];[$JSON.$J$1];[.$L227];[$JSON.$K$1];[.$O227];[$JSON.$L$1];[.$N227];[$JSON.$M$1];[.$R227];[$JSON.$N$1];[.$T227];[$JSON.$O$1];[.$W227];[$JSON.$P$1];[.$A227];[$JSON.$Q$1];[.$B227];[$JSON.$R$1])" office:value-type="string" office:string-value="{&quot;id&quot;:&quot;P-14&quot;,&quot;name&quot;:&quot;ブラックブレイド&quot;,&quot;kana&quot;:&quot;ぶらっくぶれいど&quot;,&quot;traitText&quot;:null,&quot;ruleText&quot;:&quot;イジン召喚によってイジンが自分の戦場に置かれる際、そのイジンに装備させてもよい。¶装備 : 自分の魔力ゾーンのマリョク1つにつき「パワー+500」を得る。&quot;,&quot;legacyText&quot;:&quot;復元&quot;,&quot;imageUrl&quot;:&quot;https://one-draw.jp/ijinden/cardlist/P01/card/03_P_014.png&quot;,&quot;expansion&quot;:30,&quot;rarity&quot;:1,&quot;type&quot;:4,&quot;level&quot;:1,&quot;color&quot;:16,&quot;term&quot;:0,&quot;trait&quot;:0,&quot;legacy&quot;:3,&quot;orderTable&quot;:226,&quot;orderDeck&quot;:367}," calcext:value-type="string">
            <text:p>{"id":"P-14","name":"ブラックブレイド","kana":"ぶらっくぶれいど","traitText":null,"ruleText":"イジン召喚によってイジンが自分の戦場に置かれる際、そのイジンに装備させてもよい。¶装備 : 自分の魔力ゾーンのマリョク1つにつき「パワー+500」を得る。","legacyText":"復元","imageUrl":"https://one-draw.jp/ijinden/cardlist/P01/card/03_P_014.png","expansion":30,"rarity":1,"type":4,"level":1,"color":16,"term":0,"trait":0,"legacy":3,"orderTable":226,"orderDeck":367},</text:p>
          </table:table-cell>
          <table:table-cell table:number-columns-repeated="16347"/>
        </table:table-row>
        <table:table-row table:style-name="ro2">
          <table:table-cell office:value-type="float" office:value="227" calcext:value-type="float">
            <text:p>227</text:p>
          </table:table-cell>
          <table:table-cell office:value-type="float" office:value="383" calcext:value-type="float">
            <text:p>383</text:p>
          </table:table-cell>
          <table:table-cell office:value-type="string" calcext:value-type="string">
            <text:p>P-15</text:p>
          </table:table-cell>
          <table:table-cell office:value-type="float" office:value="15" calcext:value-type="float">
            <text:p>15</text:p>
          </table:table-cell>
          <table:table-cell office:value-type="string" calcext:value-type="string">
            <text:p>パープルオーブ</text:p>
          </table:table-cell>
          <table:table-cell office:value-type="string" calcext:value-type="string">
            <text:p>ぱーぷるおーぶ</text:p>
          </table:table-cell>
          <table:table-cell office:value-type="string" calcext:value-type="string">
            <text:p>発展する医療デッキ</text:p>
          </table:table-cell>
          <table:table-cell table:formula="of:=VLOOKUP([.G228];[$収録番号.$A$1:$収録番号.$B$9];2;0)" office:value-type="float" office:value="30" calcext:value-type="float">
            <text:p>30</text:p>
          </table:table-cell>
          <table:table-cell office:value-type="string" calcext:value-type="string">
            <text:p>N</text:p>
          </table:table-cell>
          <table:table-cell table:formula="of:=VLOOKUP([.I228];[$レアリティ番号.$A$1:$レアリティ番号.$B$4];2;0)" office:value-type="float" office:value="1" calcext:value-type="float">
            <text:p>1</text:p>
          </table:table-cell>
          <table:table-cell office:value-type="string" calcext:value-type="string">
            <text:p>マリョク</text:p>
          </table:table-cell>
          <table:table-cell table:formula="of:=VLOOKUP([.K228];[$種類番号.$A$1:$種類番号.$B$4];2;0)" office:value-type="float" office:value="4" calcext:value-type="float">
            <text:p>4</text:p>
          </table:table-cell>
          <table:table-cell office:value-type="string" calcext:value-type="string">
            <text:p>紫</text:p>
          </table:table-cell>
          <table:table-cell table:formula="of:=VLOOKUP([.M228];[$色番号.$A$1:$色番号.$B$10];2;0)" office:value-type="float" office:value="16" calcext:value-type="float">
            <text:p>16</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2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28];[$特性番号.$A$1:$特性番号.$B$8];2;0);0)" office:value-type="float" office:value="0" calcext:value-type="float">
            <text:p>0</text:p>
          </table:table-cell>
          <table:table-cell/>
          <table:table-cell table:style-name="ce8" office:value-type="string" calcext:value-type="string">
            <text:p>復元</text:p>
          </table:table-cell>
          <table:table-cell table:formula="of:=IFERROR(VLOOKUP([.$V228];[$遺業能力番号.$A$1:$遺業能力番号.$B$9];2;0);0)" office:value-type="float" office:value="3" calcext:value-type="float">
            <text:p>3</text:p>
          </table:table-cell>
          <table:table-cell office:value-type="string" calcext:value-type="string">
            <text:p>https://one-draw.jp/ijinden/cardlist/P01/card/03_P_015.png</text:p>
          </table:table-cell>
          <table:table-cell table:formula="of:=CONCATENATE([$JSON.$A$1];[.$C228];[$JSON.$B$1];[.$E228];[$JSON.$C$1];[.$F228];[$JSON.$D$1];IF(ISNA([.$S228]);&quot;null&quot;;&quot;&quot;&quot;&quot;&amp;[.$S228]&amp;&quot;&quot;&quot;&quot;);[$JSON.$E$1];[.$U228];[$JSON.$F$1];IF(ISNA([.$V228]);&quot;null&quot;;&quot;&quot;&quot;&quot;&amp;[.$V228]&amp;&quot;&quot;&quot;&quot;);[$JSON.$G$1];[.$X228];[$JSON.$H$1];[.$H228];[$JSON.$I$1];[.J228];[$JSON.$J$1];[.$L228];[$JSON.$K$1];[.$O228];[$JSON.$L$1];[.$N228];[$JSON.$M$1];[.$R228];[$JSON.$N$1];[.$T228];[$JSON.$O$1];[.$W228];[$JSON.$P$1];[.$A228];[$JSON.$Q$1];[.$B228];[$JSON.$R$1])" office:value-type="string" office:string-value="{&quot;id&quot;:&quot;P-15&quot;,&quot;name&quot;:&quot;パープルオーブ&quot;,&quot;kana&quot;:&quot;ぱーぷるおーぶ&quot;,&quot;traitText&quot;:null,&quot;ruleText&quot;:&quot;&quot;,&quot;legacyText&quot;:&quot;復元&quot;,&quot;imageUrl&quot;:&quot;https://one-draw.jp/ijinden/cardlist/P01/card/03_P_015.png&quot;,&quot;expansion&quot;:30,&quot;rarity&quot;:1,&quot;type&quot;:4,&quot;level&quot;:2,&quot;color&quot;:16,&quot;term&quot;:0,&quot;trait&quot;:0,&quot;legacy&quot;:3,&quot;orderTable&quot;:227,&quot;orderDeck&quot;:383}," calcext:value-type="string">
            <text:p>{"id":"P-15","name":"パープルオーブ","kana":"ぱーぷるおーぶ","traitText":null,"ruleText":"","legacyText":"復元","imageUrl":"https://one-draw.jp/ijinden/cardlist/P01/card/03_P_015.png","expansion":30,"rarity":1,"type":4,"level":2,"color":16,"term":0,"trait":0,"legacy":3,"orderTable":227,"orderDeck":383},</text:p>
          </table:table-cell>
          <table:table-cell table:number-columns-repeated="16347"/>
        </table:table-row>
        <table:table-row table:style-name="ro2">
          <table:table-cell office:value-type="float" office:value="228" calcext:value-type="float">
            <text:p>228</text:p>
          </table:table-cell>
          <table:table-cell office:value-type="float" office:value="368" calcext:value-type="float">
            <text:p>368</text:p>
          </table:table-cell>
          <table:table-cell office:value-type="string" calcext:value-type="string">
            <text:p>P-16</text:p>
          </table:table-cell>
          <table:table-cell office:value-type="float" office:value="16" calcext:value-type="float">
            <text:p>16</text:p>
          </table:table-cell>
          <table:table-cell office:value-type="string" calcext:value-type="string">
            <text:p>パープルストーン</text:p>
          </table:table-cell>
          <table:table-cell office:value-type="string" calcext:value-type="string">
            <text:p>ぱーぷるすとーん</text:p>
          </table:table-cell>
          <table:table-cell office:value-type="string" calcext:value-type="string">
            <text:p>発展する医療デッキ</text:p>
          </table:table-cell>
          <table:table-cell table:formula="of:=VLOOKUP([.G229];[$収録番号.$A$1:$収録番号.$B$9];2;0)" office:value-type="float" office:value="30" calcext:value-type="float">
            <text:p>30</text:p>
          </table:table-cell>
          <table:table-cell office:value-type="string" calcext:value-type="string">
            <text:p>N</text:p>
          </table:table-cell>
          <table:table-cell table:formula="of:=VLOOKUP([.I229];[$レアリティ番号.$A$1:$レアリティ番号.$B$4];2;0)" office:value-type="float" office:value="1" calcext:value-type="float">
            <text:p>1</text:p>
          </table:table-cell>
          <table:table-cell office:value-type="string" calcext:value-type="string">
            <text:p>マリョク</text:p>
          </table:table-cell>
          <table:table-cell table:formula="of:=VLOOKUP([.K229];[$種類番号.$A$1:$種類番号.$B$4];2;0)" office:value-type="float" office:value="4" calcext:value-type="float">
            <text:p>4</text:p>
          </table:table-cell>
          <table:table-cell office:value-type="string" calcext:value-type="string">
            <text:p>紫</text:p>
          </table:table-cell>
          <table:table-cell table:formula="of:=VLOOKUP([.M229];[$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2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29];[$特性番号.$A$1:$特性番号.$B$8];2;0);0)" office:value-type="float" office:value="0" calcext:value-type="float">
            <text:p>0</text:p>
          </table:table-cell>
          <table:table-cell office:value-type="string" calcext:value-type="string">
            <text:p>※デッキに何枚でも入れてよい。</text:p>
          </table:table-cell>
          <table:table-cell table:style-name="ce8" office:value-type="string" calcext:value-type="string">
            <text:p>復元</text:p>
          </table:table-cell>
          <table:table-cell table:formula="of:=IFERROR(VLOOKUP([.$V229];[$遺業能力番号.$A$1:$遺業能力番号.$B$9];2;0);0)" office:value-type="float" office:value="3" calcext:value-type="float">
            <text:p>3</text:p>
          </table:table-cell>
          <table:table-cell office:value-type="string" calcext:value-type="string">
            <text:p>https://one-draw.jp/ijinden/cardlist/P01/card/03_P_016.png</text:p>
          </table:table-cell>
          <table:table-cell table:formula="of:=CONCATENATE([$JSON.$A$1];[.$C229];[$JSON.$B$1];[.$E229];[$JSON.$C$1];[.$F229];[$JSON.$D$1];IF(ISNA([.$S229]);&quot;null&quot;;&quot;&quot;&quot;&quot;&amp;[.$S229]&amp;&quot;&quot;&quot;&quot;);[$JSON.$E$1];[.$U229];[$JSON.$F$1];IF(ISNA([.$V229]);&quot;null&quot;;&quot;&quot;&quot;&quot;&amp;[.$V229]&amp;&quot;&quot;&quot;&quot;);[$JSON.$G$1];[.$X229];[$JSON.$H$1];[.$H229];[$JSON.$I$1];[.J229];[$JSON.$J$1];[.$L229];[$JSON.$K$1];[.$O229];[$JSON.$L$1];[.$N229];[$JSON.$M$1];[.$R229];[$JSON.$N$1];[.$T229];[$JSON.$O$1];[.$W229];[$JSON.$P$1];[.$A229];[$JSON.$Q$1];[.$B229];[$JSON.$R$1])" office:value-type="string" office:string-value="{&quot;id&quot;:&quot;P-16&quot;,&quot;name&quot;:&quot;パープルストーン&quot;,&quot;kana&quot;:&quot;ぱーぷるすとーん&quot;,&quot;traitText&quot;:null,&quot;ruleText&quot;:&quot;※デッキに何枚でも入れてよい。&quot;,&quot;legacyText&quot;:&quot;復元&quot;,&quot;imageUrl&quot;:&quot;https://one-draw.jp/ijinden/cardlist/P01/card/03_P_016.png&quot;,&quot;expansion&quot;:30,&quot;rarity&quot;:1,&quot;type&quot;:4,&quot;level&quot;:1,&quot;color&quot;:16,&quot;term&quot;:0,&quot;trait&quot;:0,&quot;legacy&quot;:3,&quot;orderTable&quot;:228,&quot;orderDeck&quot;:368}," calcext:value-type="string">
            <text:p>{"id":"P-16","name":"パープルストーン","kana":"ぱーぷるすとーん","traitText":null,"ruleText":"※デッキに何枚でも入れてよい。","legacyText":"復元","imageUrl":"https://one-draw.jp/ijinden/cardlist/P01/card/03_P_016.png","expansion":30,"rarity":1,"type":4,"level":1,"color":16,"term":0,"trait":0,"legacy":3,"orderTable":228,"orderDeck":368},</text:p>
          </table:table-cell>
          <table:table-cell table:number-columns-repeated="16347"/>
        </table:table-row>
        <table:table-row table:style-name="ro2">
          <table:table-cell office:value-type="float" office:value="229" calcext:value-type="float">
            <text:p>229</text:p>
          </table:table-cell>
          <table:table-cell office:value-type="float" office:value="150" calcext:value-type="float">
            <text:p>150</text:p>
          </table:table-cell>
          <table:table-cell office:value-type="string" calcext:value-type="string">
            <text:p>3-1</text:p>
          </table:table-cell>
          <table:table-cell office:value-type="float" office:value="1" calcext:value-type="float">
            <text:p>1</text:p>
          </table:table-cell>
          <table:table-cell office:value-type="string" calcext:value-type="string">
            <text:p>宮本武蔵</text:p>
          </table:table-cell>
          <table:table-cell office:value-type="string" calcext:value-type="string">
            <text:p>みやもとむさし</text:p>
          </table:table-cell>
          <table:table-cell office:value-type="string" calcext:value-type="string">
            <text:p>第３弾ブースターパック</text:p>
          </table:table-cell>
          <table:table-cell table:formula="of:=VLOOKUP([.G230];[$収録番号.$A$1:$収録番号.$B$9];2;0)" office:value-type="float" office:value="35" calcext:value-type="float">
            <text:p>35</text:p>
          </table:table-cell>
          <table:table-cell office:value-type="string" calcext:value-type="string">
            <text:p>SR</text:p>
          </table:table-cell>
          <table:table-cell table:formula="of:=VLOOKUP([.I230];[$レアリティ番号.$A$1:$レアリティ番号.$B$4];2;0)" office:value-type="float" office:value="4" calcext:value-type="float">
            <text:p>4</text:p>
          </table:table-cell>
          <table:table-cell office:value-type="string" calcext:value-type="string">
            <text:p>イジン</text:p>
          </table:table-cell>
          <table:table-cell table:formula="of:=VLOOKUP([.K230];[$種類番号.$A$1:$種類番号.$B$4];2;0)" office:value-type="float" office:value="1" calcext:value-type="float">
            <text:p>1</text:p>
          </table:table-cell>
          <table:table-cell office:value-type="string" calcext:value-type="string">
            <text:p>赤</text:p>
          </table:table-cell>
          <table:table-cell table:formula="of:=VLOOKUP([.M230];[$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30];[$能力語番号.$A$1:$能力語番号.$B$10];2;0);0)" office:value-type="float" office:value="0" calcext:value-type="float">
            <text:p>0</text:p>
          </table:table-cell>
          <table:table-cell office:value-type="string" calcext:value-type="string">
            <text:p>剣術</text:p>
          </table:table-cell>
          <table:table-cell table:formula="of:=IFERROR(VLOOKUP([.$S230];[$特性番号.$A$1:$特性番号.$B$8];2;0);0)" office:value-type="float" office:value="1" calcext:value-type="float">
            <text:p>1</text:p>
          </table:table-cell>
          <table:table-cell office:value-type="string" calcext:value-type="string">
            <text:p>カードを2つ以上装備している間「ダブルプレッシャー アタック+4000」を得る。¶戦場に「剣術」イジンが置かれたとき、パワー2000以下の相手の戦場のイジン1体を破壊する。</text:p>
          </table:table-cell>
          <table:table-cell table:style-name="ce8" table:formula="of:=NA()" office:value-type="string" office:string-value="" calcext:value-type="error">
            <text:p>#N/A</text:p>
          </table:table-cell>
          <table:table-cell table:formula="of:=IFERROR(VLOOKUP([.$V230];[$遺業能力番号.$A$1:$遺業能力番号.$B$9];2;0);0)" office:value-type="float" office:value="0" calcext:value-type="float">
            <text:p>0</text:p>
          </table:table-cell>
          <table:table-cell office:value-type="string" calcext:value-type="string">
            <text:p>https://one-draw.jp/ijinden/cardlist/003/card/03_001.png</text:p>
          </table:table-cell>
          <table:table-cell table:formula="of:=CONCATENATE([$JSON.$A$1];[.$C230];[$JSON.$B$1];[.$E230];[$JSON.$C$1];[.$F230];[$JSON.$D$1];IF(ISNA([.$S230]);&quot;null&quot;;&quot;&quot;&quot;&quot;&amp;[.$S230]&amp;&quot;&quot;&quot;&quot;);[$JSON.$E$1];[.$U230];[$JSON.$F$1];IF(ISNA([.$V230]);&quot;null&quot;;&quot;&quot;&quot;&quot;&amp;[.$V230]&amp;&quot;&quot;&quot;&quot;);[$JSON.$G$1];[.$X230];[$JSON.$H$1];[.$H230];[$JSON.$I$1];[.J230];[$JSON.$J$1];[.$L230];[$JSON.$K$1];[.$O230];[$JSON.$L$1];[.$N230];[$JSON.$M$1];[.$R230];[$JSON.$N$1];[.$T230];[$JSON.$O$1];[.$W230];[$JSON.$P$1];[.$A230];[$JSON.$Q$1];[.$B230];[$JSON.$R$1])" office:value-type="string" office:string-value="{&quot;id&quot;:&quot;3-1&quot;,&quot;name&quot;:&quot;宮本武蔵&quot;,&quot;kana&quot;:&quot;みやもとむさし&quot;,&quot;traitText&quot;:&quot;剣術&quot;,&quot;ruleText&quot;:&quot;カードを2つ以上装備している間「ダブルプレッシャー アタック+4000」を得る。¶戦場に「剣術」イジンが置かれたとき、パワー2000以下の相手の戦場のイジン1体を破壊する。&quot;,&quot;legacyText&quot;:null,&quot;imageUrl&quot;:&quot;https://one-draw.jp/ijinden/cardlist/003/card/03_001.png&quot;,&quot;expansion&quot;:35,&quot;rarity&quot;:4,&quot;type&quot;:1,&quot;level&quot;:5,&quot;color&quot;:1,&quot;term&quot;:0,&quot;trait&quot;:1,&quot;legacy&quot;:0,&quot;orderTable&quot;:229,&quot;orderDeck&quot;:150}," calcext:value-type="string">
            <text:p>{"id":"3-1","name":"宮本武蔵","kana":"みやもとむさし","traitText":"剣術","ruleText":"カードを2つ以上装備している間「ダブルプレッシャー アタック+4000」を得る。¶戦場に「剣術」イジンが置かれたとき、パワー2000以下の相手の戦場のイジン1体を破壊する。","legacyText":null,"imageUrl":"https://one-draw.jp/ijinden/cardlist/003/card/03_001.png","expansion":35,"rarity":4,"type":1,"level":5,"color":1,"term":0,"trait":1,"legacy":0,"orderTable":229,"orderDeck":150},</text:p>
          </table:table-cell>
          <table:table-cell table:number-columns-repeated="16347"/>
        </table:table-row>
        <table:table-row table:style-name="ro2">
          <table:table-cell office:value-type="float" office:value="230" calcext:value-type="float">
            <text:p>230</text:p>
          </table:table-cell>
          <table:table-cell office:value-type="float" office:value="111" calcext:value-type="float">
            <text:p>111</text:p>
          </table:table-cell>
          <table:table-cell office:value-type="string" calcext:value-type="string">
            <text:p>3-2</text:p>
          </table:table-cell>
          <table:table-cell office:value-type="float" office:value="2" calcext:value-type="float">
            <text:p>2</text:p>
          </table:table-cell>
          <table:table-cell office:value-type="string" calcext:value-type="string">
            <text:p>エリザベス1世</text:p>
          </table:table-cell>
          <table:table-cell office:value-type="string" calcext:value-type="string">
            <text:p>えりざべすいっせい</text:p>
          </table:table-cell>
          <table:table-cell office:value-type="string" calcext:value-type="string">
            <text:p>第３弾ブースターパック</text:p>
          </table:table-cell>
          <table:table-cell table:formula="of:=VLOOKUP([.G231];[$収録番号.$A$1:$収録番号.$B$9];2;0)" office:value-type="float" office:value="35" calcext:value-type="float">
            <text:p>35</text:p>
          </table:table-cell>
          <table:table-cell office:value-type="string" calcext:value-type="string">
            <text:p>SR</text:p>
          </table:table-cell>
          <table:table-cell table:formula="of:=VLOOKUP([.I231];[$レアリティ番号.$A$1:$レアリティ番号.$B$4];2;0)" office:value-type="float" office:value="4" calcext:value-type="float">
            <text:p>4</text:p>
          </table:table-cell>
          <table:table-cell office:value-type="string" calcext:value-type="string">
            <text:p>イジン</text:p>
          </table:table-cell>
          <table:table-cell table:formula="of:=VLOOKUP([.K231];[$種類番号.$A$1:$種類番号.$B$4];2;0)" office:value-type="float" office:value="1" calcext:value-type="float">
            <text:p>1</text:p>
          </table:table-cell>
          <table:table-cell office:value-type="string" calcext:value-type="string">
            <text:p>赤</text:p>
          </table:table-cell>
          <table:table-cell table:formula="of:=VLOOKUP([.M231];[$色番号.$A$1:$色番号.$B$10];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3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31];[$特性番号.$A$1:$特性番号.$B$8];2;0);0)" office:value-type="float" office:value="0" calcext:value-type="float">
            <text:p>0</text:p>
          </table:table-cell>
          <table:table-cell office:value-type="string" calcext:value-type="string">
            <text:p>能力によってカードが自分の魔力ゾーンを離れるたび、相手の戦場のパワー3000以下のイジン1体を破壊する。¶この能力はターンに1回しか発動しない。カードが裏向きで自分の魔力ゾーンに置かれたとき、1ドローする。</text:p>
          </table:table-cell>
          <table:table-cell table:style-name="ce8" office:value-type="string" calcext:value-type="string">
            <text:p>反魂</text:p>
          </table:table-cell>
          <table:table-cell table:formula="of:=IFERROR(VLOOKUP([.$V231];[$遺業能力番号.$A$1:$遺業能力番号.$B$9];2;0);0)" office:value-type="float" office:value="6" calcext:value-type="float">
            <text:p>6</text:p>
          </table:table-cell>
          <table:table-cell office:value-type="string" calcext:value-type="string">
            <text:p>https://one-draw.jp/ijinden/cardlist/003/card/03_002.png</text:p>
          </table:table-cell>
          <table:table-cell table:formula="of:=CONCATENATE([$JSON.$A$1];[.$C231];[$JSON.$B$1];[.$E231];[$JSON.$C$1];[.$F231];[$JSON.$D$1];IF(ISNA([.$S231]);&quot;null&quot;;&quot;&quot;&quot;&quot;&amp;[.$S231]&amp;&quot;&quot;&quot;&quot;);[$JSON.$E$1];[.$U231];[$JSON.$F$1];IF(ISNA([.$V231]);&quot;null&quot;;&quot;&quot;&quot;&quot;&amp;[.$V231]&amp;&quot;&quot;&quot;&quot;);[$JSON.$G$1];[.$X231];[$JSON.$H$1];[.$H231];[$JSON.$I$1];[.J231];[$JSON.$J$1];[.$L231];[$JSON.$K$1];[.$O231];[$JSON.$L$1];[.$N231];[$JSON.$M$1];[.$R231];[$JSON.$N$1];[.$T231];[$JSON.$O$1];[.$W231];[$JSON.$P$1];[.$A231];[$JSON.$Q$1];[.$B231];[$JSON.$R$1])" office:value-type="string" office:string-value="{&quot;id&quot;:&quot;3-2&quot;,&quot;name&quot;:&quot;エリザベス1世&quot;,&quot;kana&quot;:&quot;えりざべすいっせい&quot;,&quot;traitText&quot;:null,&quot;ruleText&quot;:&quot;能力によってカードが自分の魔力ゾーンを離れるたび、相手の戦場のパワー3000以下のイジン1体を破壊する。¶この能力はターンに1回しか発動しない。カードが裏向きで自分の魔力ゾーンに置かれたとき、1ドローする。&quot;,&quot;legacyText&quot;:&quot;反魂&quot;,&quot;imageUrl&quot;:&quot;https://one-draw.jp/ijinden/cardlist/003/card/03_002.png&quot;,&quot;expansion&quot;:35,&quot;rarity&quot;:4,&quot;type&quot;:1,&quot;level&quot;:4,&quot;color&quot;:1,&quot;term&quot;:0,&quot;trait&quot;:0,&quot;legacy&quot;:6,&quot;orderTable&quot;:230,&quot;orderDeck&quot;:111}," calcext:value-type="string">
            <text:p>{"id":"3-2","name":"エリザベス1世","kana":"えりざべすいっせい","traitText":null,"ruleText":"能力によってカードが自分の魔力ゾーンを離れるたび、相手の戦場のパワー3000以下のイジン1体を破壊する。¶この能力はターンに1回しか発動しない。カードが裏向きで自分の魔力ゾーンに置かれたとき、1ドローする。","legacyText":"反魂","imageUrl":"https://one-draw.jp/ijinden/cardlist/003/card/03_002.png","expansion":35,"rarity":4,"type":1,"level":4,"color":1,"term":0,"trait":0,"legacy":6,"orderTable":230,"orderDeck":111},</text:p>
          </table:table-cell>
          <table:table-cell table:number-columns-repeated="16347"/>
        </table:table-row>
        <table:table-row table:style-name="ro2">
          <table:table-cell office:value-type="float" office:value="231" calcext:value-type="float">
            <text:p>231</text:p>
          </table:table-cell>
          <table:table-cell office:value-type="float" office:value="206" calcext:value-type="float">
            <text:p>206</text:p>
          </table:table-cell>
          <table:table-cell office:value-type="string" calcext:value-type="string">
            <text:p>3-3</text:p>
          </table:table-cell>
          <table:table-cell office:value-type="float" office:value="3" calcext:value-type="float">
            <text:p>3</text:p>
          </table:table-cell>
          <table:table-cell office:value-type="string" calcext:value-type="string">
            <text:p>エンリケ航海王子</text:p>
          </table:table-cell>
          <table:table-cell office:value-type="string" calcext:value-type="string">
            <text:p>えんりけこうかいおうじ</text:p>
          </table:table-cell>
          <table:table-cell office:value-type="string" calcext:value-type="string">
            <text:p>第３弾ブースターパック</text:p>
          </table:table-cell>
          <table:table-cell table:formula="of:=VLOOKUP([.G232];[$収録番号.$A$1:$収録番号.$B$9];2;0)" office:value-type="float" office:value="35" calcext:value-type="float">
            <text:p>35</text:p>
          </table:table-cell>
          <table:table-cell office:value-type="string" calcext:value-type="string">
            <text:p>SR</text:p>
          </table:table-cell>
          <table:table-cell table:formula="of:=VLOOKUP([.I232];[$レアリティ番号.$A$1:$レアリティ番号.$B$4];2;0)" office:value-type="float" office:value="4" calcext:value-type="float">
            <text:p>4</text:p>
          </table:table-cell>
          <table:table-cell office:value-type="string" calcext:value-type="string">
            <text:p>イジン</text:p>
          </table:table-cell>
          <table:table-cell table:formula="of:=VLOOKUP([.K232];[$種類番号.$A$1:$種類番号.$B$4];2;0)" office:value-type="float" office:value="1" calcext:value-type="float">
            <text:p>1</text:p>
          </table:table-cell>
          <table:table-cell office:value-type="string" calcext:value-type="string">
            <text:p>青</text:p>
          </table:table-cell>
          <table:table-cell table:formula="of:=VLOOKUP([.M232];[$色番号.$A$1:$色番号.$B$10];2;0)" office:value-type="float" office:value="2" calcext:value-type="float">
            <text:p>2</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3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32];[$特性番号.$A$1:$特性番号.$B$8];2;0);0)" office:value-type="float" office:value="0" calcext:value-type="float">
            <text:p>0</text:p>
          </table:table-cell>
          <table:table-cell office:value-type="string" calcext:value-type="string">
            <text:p>自分のメインフェイズが開始したとき、自分の魔力ゾーンのマリョク1つを墓地に置いて発動できる。このターンに限り「これが戦場にいる間、自分の戦場の「航海」は、戦場に置かれたときでも発動する」を得る。</text:p>
          </table:table-cell>
          <table:table-cell table:style-name="ce8" office:value-type="string" calcext:value-type="string">
            <text:p>1ドローする</text:p>
          </table:table-cell>
          <table:table-cell table:formula="of:=IFERROR(VLOOKUP([.$V232];[$遺業能力番号.$A$1:$遺業能力番号.$B$9];2;0);0)" office:value-type="float" office:value="4" calcext:value-type="float">
            <text:p>4</text:p>
          </table:table-cell>
          <table:table-cell office:value-type="string" calcext:value-type="string">
            <text:p>https://one-draw.jp/ijinden/cardlist/003/card/03_003.png</text:p>
          </table:table-cell>
          <table:table-cell table:formula="of:=CONCATENATE([$JSON.$A$1];[.$C232];[$JSON.$B$1];[.$E232];[$JSON.$C$1];[.$F232];[$JSON.$D$1];IF(ISNA([.$S232]);&quot;null&quot;;&quot;&quot;&quot;&quot;&amp;[.$S232]&amp;&quot;&quot;&quot;&quot;);[$JSON.$E$1];[.$U232];[$JSON.$F$1];IF(ISNA([.$V232]);&quot;null&quot;;&quot;&quot;&quot;&quot;&amp;[.$V232]&amp;&quot;&quot;&quot;&quot;);[$JSON.$G$1];[.$X232];[$JSON.$H$1];[.$H232];[$JSON.$I$1];[.J232];[$JSON.$J$1];[.$L232];[$JSON.$K$1];[.$O232];[$JSON.$L$1];[.$N232];[$JSON.$M$1];[.$R232];[$JSON.$N$1];[.$T232];[$JSON.$O$1];[.$W232];[$JSON.$P$1];[.$A232];[$JSON.$Q$1];[.$B232];[$JSON.$R$1])" office:value-type="string" office:string-value="{&quot;id&quot;:&quot;3-3&quot;,&quot;name&quot;:&quot;エンリケ航海王子&quot;,&quot;kana&quot;:&quot;えんりけこうかいおうじ&quot;,&quot;traitText&quot;:null,&quot;ruleText&quot;:&quot;自分のメインフェイズが開始したとき、自分の魔力ゾーンのマリョク1つを墓地に置いて発動できる。このターンに限り「これが戦場にいる間、自分の戦場の「航海」は、戦場に置かれたときでも発動する」を得る。&quot;,&quot;legacyText&quot;:&quot;1ドローする&quot;,&quot;imageUrl&quot;:&quot;https://one-draw.jp/ijinden/cardlist/003/card/03_003.png&quot;,&quot;expansion&quot;:35,&quot;rarity&quot;:4,&quot;type&quot;:1,&quot;level&quot;:7,&quot;color&quot;:2,&quot;term&quot;:0,&quot;trait&quot;:0,&quot;legacy&quot;:4,&quot;orderTable&quot;:231,&quot;orderDeck&quot;:206}," calcext:value-type="string">
            <text:p>{"id":"3-3","name":"エンリケ航海王子","kana":"えんりけこうかいおうじ","traitText":null,"ruleText":"自分のメインフェイズが開始したとき、自分の魔力ゾーンのマリョク1つを墓地に置いて発動できる。このターンに限り「これが戦場にいる間、自分の戦場の「航海」は、戦場に置かれたときでも発動する」を得る。","legacyText":"1ドローする","imageUrl":"https://one-draw.jp/ijinden/cardlist/003/card/03_003.png","expansion":35,"rarity":4,"type":1,"level":7,"color":2,"term":0,"trait":0,"legacy":4,"orderTable":231,"orderDeck":206},</text:p>
          </table:table-cell>
          <table:table-cell table:number-columns-repeated="16347"/>
        </table:table-row>
        <table:table-row table:style-name="ro2">
          <table:table-cell office:value-type="float" office:value="232" calcext:value-type="float">
            <text:p>232</text:p>
          </table:table-cell>
          <table:table-cell office:value-type="float" office:value="160" calcext:value-type="float">
            <text:p>160</text:p>
          </table:table-cell>
          <table:table-cell office:value-type="string" calcext:value-type="string">
            <text:p>3-4</text:p>
          </table:table-cell>
          <table:table-cell office:value-type="float" office:value="4" calcext:value-type="float">
            <text:p>4</text:p>
          </table:table-cell>
          <table:table-cell office:value-type="string" calcext:value-type="string">
            <text:p>吉田松陰</text:p>
          </table:table-cell>
          <table:table-cell office:value-type="string" calcext:value-type="string">
            <text:p>よしだしょういん</text:p>
          </table:table-cell>
          <table:table-cell office:value-type="string" calcext:value-type="string">
            <text:p>第３弾ブースターパック</text:p>
          </table:table-cell>
          <table:table-cell table:formula="of:=VLOOKUP([.G233];[$収録番号.$A$1:$収録番号.$B$9];2;0)" office:value-type="float" office:value="35" calcext:value-type="float">
            <text:p>35</text:p>
          </table:table-cell>
          <table:table-cell office:value-type="string" calcext:value-type="string">
            <text:p>SR</text:p>
          </table:table-cell>
          <table:table-cell table:formula="of:=VLOOKUP([.I233];[$レアリティ番号.$A$1:$レアリティ番号.$B$4];2;0)" office:value-type="float" office:value="4" calcext:value-type="float">
            <text:p>4</text:p>
          </table:table-cell>
          <table:table-cell office:value-type="string" calcext:value-type="string">
            <text:p>イジン</text:p>
          </table:table-cell>
          <table:table-cell table:formula="of:=VLOOKUP([.K233];[$種類番号.$A$1:$種類番号.$B$4];2;0)" office:value-type="float" office:value="1" calcext:value-type="float">
            <text:p>1</text:p>
          </table:table-cell>
          <table:table-cell office:value-type="string" calcext:value-type="string">
            <text:p>青</text:p>
          </table:table-cell>
          <table:table-cell table:formula="of:=VLOOKUP([.M233];[$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33];[$能力語番号.$A$1:$能力語番号.$B$10];2;0);0)" office:value-type="float" office:value="0" calcext:value-type="float">
            <text:p>0</text:p>
          </table:table-cell>
          <table:table-cell office:value-type="string" calcext:value-type="string">
            <text:p>思想</text:p>
          </table:table-cell>
          <table:table-cell table:formula="of:=IFERROR(VLOOKUP([.$S233];[$特性番号.$A$1:$特性番号.$B$8];2;0);0)" office:value-type="float" office:value="8" calcext:value-type="float">
            <text:p>8</text:p>
          </table:table-cell>
          <table:table-cell office:value-type="string" calcext:value-type="string">
            <text:p>これが戦場にいる間「決起」は発動しない。¶起きているイジンが相手の戦場にいる間、自分の戦場の「思想」イジンは「ダブルプレッシャー」を得る</text:p>
          </table:table-cell>
          <table:table-cell table:style-name="ce8" office:value-type="string" calcext:value-type="string">
            <text:p>1ドローする</text:p>
          </table:table-cell>
          <table:table-cell table:formula="of:=IFERROR(VLOOKUP([.$V233];[$遺業能力番号.$A$1:$遺業能力番号.$B$9];2;0);0)" office:value-type="float" office:value="4" calcext:value-type="float">
            <text:p>4</text:p>
          </table:table-cell>
          <table:table-cell office:value-type="string" calcext:value-type="string">
            <text:p>https://one-draw.jp/ijinden/cardlist/003/card/03_004.png</text:p>
          </table:table-cell>
          <table:table-cell table:formula="of:=CONCATENATE([$JSON.$A$1];[.$C233];[$JSON.$B$1];[.$E233];[$JSON.$C$1];[.$F233];[$JSON.$D$1];IF(ISNA([.$S233]);&quot;null&quot;;&quot;&quot;&quot;&quot;&amp;[.$S233]&amp;&quot;&quot;&quot;&quot;);[$JSON.$E$1];[.$U233];[$JSON.$F$1];IF(ISNA([.$V233]);&quot;null&quot;;&quot;&quot;&quot;&quot;&amp;[.$V233]&amp;&quot;&quot;&quot;&quot;);[$JSON.$G$1];[.$X233];[$JSON.$H$1];[.$H233];[$JSON.$I$1];[.J233];[$JSON.$J$1];[.$L233];[$JSON.$K$1];[.$O233];[$JSON.$L$1];[.$N233];[$JSON.$M$1];[.$R233];[$JSON.$N$1];[.$T233];[$JSON.$O$1];[.$W233];[$JSON.$P$1];[.$A233];[$JSON.$Q$1];[.$B233];[$JSON.$R$1])" office:value-type="string" office:string-value="{&quot;id&quot;:&quot;3-4&quot;,&quot;name&quot;:&quot;吉田松陰&quot;,&quot;kana&quot;:&quot;よしだしょういん&quot;,&quot;traitText&quot;:&quot;思想&quot;,&quot;ruleText&quot;:&quot;これが戦場にいる間「決起」は発動しない。¶起きているイジンが相手の戦場にいる間、自分の戦場の「思想」イジンは「ダブルプレッシャー」を得る&quot;,&quot;legacyText&quot;:&quot;1ドローする&quot;,&quot;imageUrl&quot;:&quot;https://one-draw.jp/ijinden/cardlist/003/card/03_004.png&quot;,&quot;expansion&quot;:35,&quot;rarity&quot;:4,&quot;type&quot;:1,&quot;level&quot;:5,&quot;color&quot;:2,&quot;term&quot;:0,&quot;trait&quot;:8,&quot;legacy&quot;:4,&quot;orderTable&quot;:232,&quot;orderDeck&quot;:160}," calcext:value-type="string">
            <text:p>{"id":"3-4","name":"吉田松陰","kana":"よしだしょういん","traitText":"思想","ruleText":"これが戦場にいる間「決起」は発動しない。¶起きているイジンが相手の戦場にいる間、自分の戦場の「思想」イジンは「ダブルプレッシャー」を得る","legacyText":"1ドローする","imageUrl":"https://one-draw.jp/ijinden/cardlist/003/card/03_004.png","expansion":35,"rarity":4,"type":1,"level":5,"color":2,"term":0,"trait":8,"legacy":4,"orderTable":232,"orderDeck":160},</text:p>
          </table:table-cell>
          <table:table-cell table:number-columns-repeated="16347"/>
        </table:table-row>
        <table:table-row table:style-name="ro2">
          <table:table-cell office:value-type="float" office:value="233" calcext:value-type="float">
            <text:p>233</text:p>
          </table:table-cell>
          <table:table-cell office:value-type="float" office:value="169" calcext:value-type="float">
            <text:p>169</text:p>
          </table:table-cell>
          <table:table-cell office:value-type="string" calcext:value-type="string">
            <text:p>3-5</text:p>
          </table:table-cell>
          <table:table-cell office:value-type="float" office:value="5" calcext:value-type="float">
            <text:p>5</text:p>
          </table:table-cell>
          <table:table-cell office:value-type="string" calcext:value-type="string">
            <text:p>徳川光圀</text:p>
          </table:table-cell>
          <table:table-cell office:value-type="string" calcext:value-type="string">
            <text:p>とくがわみつくに</text:p>
          </table:table-cell>
          <table:table-cell office:value-type="string" calcext:value-type="string">
            <text:p>第３弾ブースターパック</text:p>
          </table:table-cell>
          <table:table-cell table:formula="of:=VLOOKUP([.G234];[$収録番号.$A$1:$収録番号.$B$9];2;0)" office:value-type="float" office:value="35" calcext:value-type="float">
            <text:p>35</text:p>
          </table:table-cell>
          <table:table-cell office:value-type="string" calcext:value-type="string">
            <text:p>SR</text:p>
          </table:table-cell>
          <table:table-cell table:formula="of:=VLOOKUP([.I234];[$レアリティ番号.$A$1:$レアリティ番号.$B$4];2;0)" office:value-type="float" office:value="4" calcext:value-type="float">
            <text:p>4</text:p>
          </table:table-cell>
          <table:table-cell office:value-type="string" calcext:value-type="string">
            <text:p>イジン</text:p>
          </table:table-cell>
          <table:table-cell table:formula="of:=VLOOKUP([.K234];[$種類番号.$A$1:$種類番号.$B$4];2;0)" office:value-type="float" office:value="1" calcext:value-type="float">
            <text:p>1</text:p>
          </table:table-cell>
          <table:table-cell office:value-type="string" calcext:value-type="string">
            <text:p>緑</text:p>
          </table:table-cell>
          <table:table-cell table:formula="of:=VLOOKUP([.M234];[$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執筆</text:p>
          </table:table-cell>
          <table:table-cell table:formula="of:=IFERROR(VLOOKUP([.$Q234];[$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234];[$特性番号.$A$1:$特性番号.$B$8];2;0);0)" office:value-type="float" office:value="0" calcext:value-type="float">
            <text:p>0</text:p>
          </table:table-cell>
          <table:table-cell office:value-type="string" calcext:value-type="string">
            <text:p>執筆 - この能力はターンに1回しか発動しない。緑のハイケイが戦場に置かれたとき、戦場のイジン1体を指定して発動できる。そのイジンが緑のイジンか「思想」イジンなら、そのイジンを起こして、そのイジンは、このターンに限り「パワー+3000」を得る。そうでなければ、そのイジンを寝かせる。</text:p>
          </table:table-cell>
          <table:table-cell table:style-name="ce8" office:value-type="string" calcext:value-type="string">
            <text:p>木霊</text:p>
          </table:table-cell>
          <table:table-cell table:formula="of:=IFERROR(VLOOKUP([.$V234];[$遺業能力番号.$A$1:$遺業能力番号.$B$9];2;0);0)" office:value-type="float" office:value="8" calcext:value-type="float">
            <text:p>8</text:p>
          </table:table-cell>
          <table:table-cell office:value-type="string" calcext:value-type="string">
            <text:p>https://one-draw.jp/ijinden/cardlist/003/card/03_005.png</text:p>
          </table:table-cell>
          <table:table-cell table:formula="of:=CONCATENATE([$JSON.$A$1];[.$C234];[$JSON.$B$1];[.$E234];[$JSON.$C$1];[.$F234];[$JSON.$D$1];IF(ISNA([.$S234]);&quot;null&quot;;&quot;&quot;&quot;&quot;&amp;[.$S234]&amp;&quot;&quot;&quot;&quot;);[$JSON.$E$1];[.$U234];[$JSON.$F$1];IF(ISNA([.$V234]);&quot;null&quot;;&quot;&quot;&quot;&quot;&amp;[.$V234]&amp;&quot;&quot;&quot;&quot;);[$JSON.$G$1];[.$X234];[$JSON.$H$1];[.$H234];[$JSON.$I$1];[.J234];[$JSON.$J$1];[.$L234];[$JSON.$K$1];[.$O234];[$JSON.$L$1];[.$N234];[$JSON.$M$1];[.$R234];[$JSON.$N$1];[.$T234];[$JSON.$O$1];[.$W234];[$JSON.$P$1];[.$A234];[$JSON.$Q$1];[.$B234];[$JSON.$R$1])" office:value-type="string" office:string-value="{&quot;id&quot;:&quot;3-5&quot;,&quot;name&quot;:&quot;徳川光圀&quot;,&quot;kana&quot;:&quot;とくがわみつくに&quot;,&quot;traitText&quot;:null,&quot;ruleText&quot;:&quot;執筆 - この能力はターンに1回しか発動しない。緑のハイケイが戦場に置かれたとき、戦場のイジン1体を指定して発動できる。そのイジンが緑のイジンか「思想」イジンなら、そのイジンを起こして、そのイジンは、このターンに限り「パワー+3000」を得る。そうでなければ、そのイジンを寝かせる。&quot;,&quot;legacyText&quot;:&quot;木霊&quot;,&quot;imageUrl&quot;:&quot;https://one-draw.jp/ijinden/cardlist/003/card/03_005.png&quot;,&quot;expansion&quot;:35,&quot;rarity&quot;:4,&quot;type&quot;:1,&quot;level&quot;:5,&quot;color&quot;:4,&quot;term&quot;:2,&quot;trait&quot;:0,&quot;legacy&quot;:8,&quot;orderTable&quot;:233,&quot;orderDeck&quot;:169}," calcext:value-type="string">
            <text:p>{"id":"3-5","name":"徳川光圀","kana":"とくがわみつくに","traitText":null,"ruleText":"執筆 - この能力はターンに1回しか発動しない。緑のハイケイが戦場に置かれたとき、戦場のイジン1体を指定して発動できる。そのイジンが緑のイジンか「思想」イジンなら、そのイジンを起こして、そのイジンは、このターンに限り「パワー+3000」を得る。そうでなければ、そのイジンを寝かせる。","legacyText":"木霊","imageUrl":"https://one-draw.jp/ijinden/cardlist/003/card/03_005.png","expansion":35,"rarity":4,"type":1,"level":5,"color":4,"term":2,"trait":0,"legacy":8,"orderTable":233,"orderDeck":169},</text:p>
          </table:table-cell>
          <table:table-cell table:number-columns-repeated="16347"/>
        </table:table-row>
        <table:table-row table:style-name="ro2">
          <table:table-cell office:value-type="float" office:value="234" calcext:value-type="float">
            <text:p>234</text:p>
          </table:table-cell>
          <table:table-cell office:value-type="float" office:value="211" calcext:value-type="float">
            <text:p>211</text:p>
          </table:table-cell>
          <table:table-cell office:value-type="string" calcext:value-type="string">
            <text:p>3-6</text:p>
          </table:table-cell>
          <table:table-cell office:value-type="float" office:value="6" calcext:value-type="float">
            <text:p>6</text:p>
          </table:table-cell>
          <table:table-cell office:value-type="string" calcext:value-type="string">
            <text:p>葛飾応為</text:p>
          </table:table-cell>
          <table:table-cell office:value-type="string" calcext:value-type="string">
            <text:p>かつしかおうい</text:p>
          </table:table-cell>
          <table:table-cell office:value-type="string" calcext:value-type="string">
            <text:p>第３弾ブースターパック</text:p>
          </table:table-cell>
          <table:table-cell table:formula="of:=VLOOKUP([.G235];[$収録番号.$A$1:$収録番号.$B$9];2;0)" office:value-type="float" office:value="35" calcext:value-type="float">
            <text:p>35</text:p>
          </table:table-cell>
          <table:table-cell office:value-type="string" calcext:value-type="string">
            <text:p>SR</text:p>
          </table:table-cell>
          <table:table-cell table:formula="of:=VLOOKUP([.I235];[$レアリティ番号.$A$1:$レアリティ番号.$B$4];2;0)" office:value-type="float" office:value="4" calcext:value-type="float">
            <text:p>4</text:p>
          </table:table-cell>
          <table:table-cell office:value-type="string" calcext:value-type="string">
            <text:p>イジン</text:p>
          </table:table-cell>
          <table:table-cell table:formula="of:=VLOOKUP([.K235];[$種類番号.$A$1:$種類番号.$B$4];2;0)" office:value-type="float" office:value="1" calcext:value-type="float">
            <text:p>1</text:p>
          </table:table-cell>
          <table:table-cell office:value-type="string" calcext:value-type="string">
            <text:p>緑</text:p>
          </table:table-cell>
          <table:table-cell table:formula="of:=VLOOKUP([.M235];[$色番号.$A$1:$色番号.$B$10];2;0)" office:value-type="float" office:value="4" calcext:value-type="float">
            <text:p>4</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35];[$能力語番号.$A$1:$能力語番号.$B$10];2;0);0)" office:value-type="float" office:value="0" calcext:value-type="float">
            <text:p>0</text:p>
          </table:table-cell>
          <table:table-cell office:value-type="string" calcext:value-type="string">
            <text:p>美術</text:p>
          </table:table-cell>
          <table:table-cell table:formula="of:=IFERROR(VLOOKUP([.$S235];[$特性番号.$A$1:$特性番号.$B$8];2;0);0)" office:value-type="float" office:value="2" calcext:value-type="float">
            <text:p>2</text:p>
          </table:table-cell>
          <table:table-cell office:value-type="string" calcext:value-type="string">
            <text:p>これのイジン召喚に際し、自分の手札のハイケイをすきなだけ墓地に置いてもよい。これのレベルは、墓地に置いた1つにつき1だけ下がる。¶戦場に置かれたとき、戦場のレベル6以下の「美術」カードすべてを手札に戻して、イジン召喚権+1する。</text:p>
          </table:table-cell>
          <table:table-cell table:style-name="ce8" office:value-type="string" calcext:value-type="string">
            <text:p>魔力化</text:p>
          </table:table-cell>
          <table:table-cell table:formula="of:=IFERROR(VLOOKUP([.$V235];[$遺業能力番号.$A$1:$遺業能力番号.$B$9];2;0);0)" office:value-type="float" office:value="1" calcext:value-type="float">
            <text:p>1</text:p>
          </table:table-cell>
          <table:table-cell office:value-type="string" calcext:value-type="string">
            <text:p>https://one-draw.jp/ijinden/cardlist/003/card/03_006.png</text:p>
          </table:table-cell>
          <table:table-cell table:formula="of:=CONCATENATE([$JSON.$A$1];[.$C235];[$JSON.$B$1];[.$E235];[$JSON.$C$1];[.$F235];[$JSON.$D$1];IF(ISNA([.$S235]);&quot;null&quot;;&quot;&quot;&quot;&quot;&amp;[.$S235]&amp;&quot;&quot;&quot;&quot;);[$JSON.$E$1];[.$U235];[$JSON.$F$1];IF(ISNA([.$V235]);&quot;null&quot;;&quot;&quot;&quot;&quot;&amp;[.$V235]&amp;&quot;&quot;&quot;&quot;);[$JSON.$G$1];[.$X235];[$JSON.$H$1];[.$H235];[$JSON.$I$1];[.J235];[$JSON.$J$1];[.$L235];[$JSON.$K$1];[.$O235];[$JSON.$L$1];[.$N235];[$JSON.$M$1];[.$R235];[$JSON.$N$1];[.$T235];[$JSON.$O$1];[.$W235];[$JSON.$P$1];[.$A235];[$JSON.$Q$1];[.$B235];[$JSON.$R$1])" office:value-type="string" office:string-value="{&quot;id&quot;:&quot;3-6&quot;,&quot;name&quot;:&quot;葛飾応為&quot;,&quot;kana&quot;:&quot;かつしかおうい&quot;,&quot;traitText&quot;:&quot;美術&quot;,&quot;ruleText&quot;:&quot;これのイジン召喚に際し、自分の手札のハイケイをすきなだけ墓地に置いてもよい。これのレベルは、墓地に置いた1つにつき1だけ下がる。¶戦場に置かれたとき、戦場のレベル6以下の「美術」カードすべてを手札に戻して、イジン召喚権+1する。&quot;,&quot;legacyText&quot;:&quot;魔力化&quot;,&quot;imageUrl&quot;:&quot;https://one-draw.jp/ijinden/cardlist/003/card/03_006.png&quot;,&quot;expansion&quot;:35,&quot;rarity&quot;:4,&quot;type&quot;:1,&quot;level&quot;:7,&quot;color&quot;:4,&quot;term&quot;:0,&quot;trait&quot;:2,&quot;legacy&quot;:1,&quot;orderTable&quot;:234,&quot;orderDeck&quot;:211}," calcext:value-type="string">
            <text:p>{"id":"3-6","name":"葛飾応為","kana":"かつしかおうい","traitText":"美術","ruleText":"これのイジン召喚に際し、自分の手札のハイケイをすきなだけ墓地に置いてもよい。これのレベルは、墓地に置いた1つにつき1だけ下がる。¶戦場に置かれたとき、戦場のレベル6以下の「美術」カードすべてを手札に戻して、イジン召喚権+1する。","legacyText":"魔力化","imageUrl":"https://one-draw.jp/ijinden/cardlist/003/card/03_006.png","expansion":35,"rarity":4,"type":1,"level":7,"color":4,"term":0,"trait":2,"legacy":1,"orderTable":234,"orderDeck":211},</text:p>
          </table:table-cell>
          <table:table-cell table:number-columns-repeated="16347"/>
        </table:table-row>
        <table:table-row table:style-name="ro2">
          <table:table-cell office:value-type="float" office:value="235" calcext:value-type="float">
            <text:p>235</text:p>
          </table:table-cell>
          <table:table-cell office:value-type="float" office:value="174" calcext:value-type="float">
            <text:p>174</text:p>
          </table:table-cell>
          <table:table-cell office:value-type="string" calcext:value-type="string">
            <text:p>3-7</text:p>
          </table:table-cell>
          <table:table-cell office:value-type="float" office:value="7" calcext:value-type="float">
            <text:p>7</text:p>
          </table:table-cell>
          <table:table-cell office:value-type="string" calcext:value-type="string">
            <text:p>曹丕</text:p>
          </table:table-cell>
          <table:table-cell office:value-type="string" calcext:value-type="string">
            <text:p>そうひ</text:p>
          </table:table-cell>
          <table:table-cell office:value-type="string" calcext:value-type="string">
            <text:p>第３弾ブースターパック</text:p>
          </table:table-cell>
          <table:table-cell table:formula="of:=VLOOKUP([.G236];[$収録番号.$A$1:$収録番号.$B$9];2;0)" office:value-type="float" office:value="35" calcext:value-type="float">
            <text:p>35</text:p>
          </table:table-cell>
          <table:table-cell office:value-type="string" calcext:value-type="string">
            <text:p>SR</text:p>
          </table:table-cell>
          <table:table-cell table:formula="of:=VLOOKUP([.I236];[$レアリティ番号.$A$1:$レアリティ番号.$B$4];2;0)" office:value-type="float" office:value="4" calcext:value-type="float">
            <text:p>4</text:p>
          </table:table-cell>
          <table:table-cell office:value-type="string" calcext:value-type="string">
            <text:p>イジン</text:p>
          </table:table-cell>
          <table:table-cell table:formula="of:=VLOOKUP([.K236];[$種類番号.$A$1:$種類番号.$B$4];2;0)" office:value-type="float" office:value="1" calcext:value-type="float">
            <text:p>1</text:p>
          </table:table-cell>
          <table:table-cell office:value-type="string" calcext:value-type="string">
            <text:p>黄</text:p>
          </table:table-cell>
          <table:table-cell table:formula="of:=VLOOKUP([.M236];[$色番号.$A$1:$色番号.$B$10];2;0)" office:value-type="float" office:value="8" calcext:value-type="float">
            <text:p>8</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執筆</text:p>
          </table:table-cell>
          <table:table-cell table:formula="of:=IFERROR(VLOOKUP([.$Q236];[$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236];[$特性番号.$A$1:$特性番号.$B$8];2;0);0)" office:value-type="float" office:value="0" calcext:value-type="float">
            <text:p>0</text:p>
          </table:table-cell>
          <table:table-cell office:value-type="string" calcext:value-type="string">
            <text:p>これが戦場にいる間、戦場の黄のイジンは「寝たとき、パワー4000以下のイジン1体を破壊する」を得る。¶執筆 - ハイケイが戦場に置かれたときに発動する。戦場のイジンすべては、このターンに限り「色：黄」を得る。</text:p>
          </table:table-cell>
          <table:table-cell table:style-name="ce8" table:formula="of:=NA()" office:value-type="string" office:string-value="" calcext:value-type="error">
            <text:p>#N/A</text:p>
          </table:table-cell>
          <table:table-cell table:formula="of:=IFERROR(VLOOKUP([.$V236];[$遺業能力番号.$A$1:$遺業能力番号.$B$9];2;0);0)" office:value-type="float" office:value="0" calcext:value-type="float">
            <text:p>0</text:p>
          </table:table-cell>
          <table:table-cell office:value-type="string" calcext:value-type="string">
            <text:p>https://one-draw.jp/ijinden/cardlist/003/card/03_007.png</text:p>
          </table:table-cell>
          <table:table-cell table:formula="of:=CONCATENATE([$JSON.$A$1];[.$C236];[$JSON.$B$1];[.$E236];[$JSON.$C$1];[.$F236];[$JSON.$D$1];IF(ISNA([.$S236]);&quot;null&quot;;&quot;&quot;&quot;&quot;&amp;[.$S236]&amp;&quot;&quot;&quot;&quot;);[$JSON.$E$1];[.$U236];[$JSON.$F$1];IF(ISNA([.$V236]);&quot;null&quot;;&quot;&quot;&quot;&quot;&amp;[.$V236]&amp;&quot;&quot;&quot;&quot;);[$JSON.$G$1];[.$X236];[$JSON.$H$1];[.$H236];[$JSON.$I$1];[.J236];[$JSON.$J$1];[.$L236];[$JSON.$K$1];[.$O236];[$JSON.$L$1];[.$N236];[$JSON.$M$1];[.$R236];[$JSON.$N$1];[.$T236];[$JSON.$O$1];[.$W236];[$JSON.$P$1];[.$A236];[$JSON.$Q$1];[.$B236];[$JSON.$R$1])" office:value-type="string" office:string-value="{&quot;id&quot;:&quot;3-7&quot;,&quot;name&quot;:&quot;曹丕&quot;,&quot;kana&quot;:&quot;そうひ&quot;,&quot;traitText&quot;:null,&quot;ruleText&quot;:&quot;これが戦場にいる間、戦場の黄のイジンは「寝たとき、パワー4000以下のイジン1体を破壊する」を得る。¶執筆 - ハイケイが戦場に置かれたときに発動する。戦場のイジンすべては、このターンに限り「色：黄」を得る。&quot;,&quot;legacyText&quot;:null,&quot;imageUrl&quot;:&quot;https://one-draw.jp/ijinden/cardlist/003/card/03_007.png&quot;,&quot;expansion&quot;:35,&quot;rarity&quot;:4,&quot;type&quot;:1,&quot;level&quot;:5,&quot;color&quot;:8,&quot;term&quot;:2,&quot;trait&quot;:0,&quot;legacy&quot;:0,&quot;orderTable&quot;:235,&quot;orderDeck&quot;:174}," calcext:value-type="string">
            <text:p>{"id":"3-7","name":"曹丕","kana":"そうひ","traitText":null,"ruleText":"これが戦場にいる間、戦場の黄のイジンは「寝たとき、パワー4000以下のイジン1体を破壊する」を得る。¶執筆 - ハイケイが戦場に置かれたときに発動する。戦場のイジンすべては、このターンに限り「色：黄」を得る。","legacyText":null,"imageUrl":"https://one-draw.jp/ijinden/cardlist/003/card/03_007.png","expansion":35,"rarity":4,"type":1,"level":5,"color":8,"term":2,"trait":0,"legacy":0,"orderTable":235,"orderDeck":174},</text:p>
          </table:table-cell>
          <table:table-cell table:number-columns-repeated="16347"/>
        </table:table-row>
        <table:table-row table:style-name="ro2">
          <table:table-cell office:value-type="float" office:value="236" calcext:value-type="float">
            <text:p>236</text:p>
          </table:table-cell>
          <table:table-cell office:value-type="float" office:value="226" calcext:value-type="float">
            <text:p>226</text:p>
          </table:table-cell>
          <table:table-cell office:value-type="string" calcext:value-type="string">
            <text:p>3-8</text:p>
          </table:table-cell>
          <table:table-cell office:value-type="float" office:value="8" calcext:value-type="float">
            <text:p>8</text:p>
          </table:table-cell>
          <table:table-cell office:value-type="string" calcext:value-type="string">
            <text:p>ジェーン・オースティン</text:p>
          </table:table-cell>
          <table:table-cell office:value-type="string" calcext:value-type="string">
            <text:p>じぇーんおーすてぃん</text:p>
          </table:table-cell>
          <table:table-cell office:value-type="string" calcext:value-type="string">
            <text:p>第３弾ブースターパック</text:p>
          </table:table-cell>
          <table:table-cell table:formula="of:=VLOOKUP([.G237];[$収録番号.$A$1:$収録番号.$B$9];2;0)" office:value-type="float" office:value="35" calcext:value-type="float">
            <text:p>35</text:p>
          </table:table-cell>
          <table:table-cell office:value-type="string" calcext:value-type="string">
            <text:p>SR</text:p>
          </table:table-cell>
          <table:table-cell table:formula="of:=VLOOKUP([.I237];[$レアリティ番号.$A$1:$レアリティ番号.$B$4];2;0)" office:value-type="float" office:value="4" calcext:value-type="float">
            <text:p>4</text:p>
          </table:table-cell>
          <table:table-cell office:value-type="string" calcext:value-type="string">
            <text:p>イジン</text:p>
          </table:table-cell>
          <table:table-cell table:formula="of:=VLOOKUP([.K237];[$種類番号.$A$1:$種類番号.$B$4];2;0)" office:value-type="float" office:value="1" calcext:value-type="float">
            <text:p>1</text:p>
          </table:table-cell>
          <table:table-cell office:value-type="string" calcext:value-type="string">
            <text:p>黄</text:p>
          </table:table-cell>
          <table:table-cell table:formula="of:=VLOOKUP([.M237];[$色番号.$A$1:$色番号.$B$10];2;0)" office:value-type="float" office:value="8" calcext:value-type="float">
            <text:p>8</text:p>
          </table:table-cell>
          <table:table-cell office:value-type="float" office:value="8" calcext:value-type="float">
            <text:p>8</text:p>
          </table:table-cell>
          <table:table-cell table:formula="of:=NA()" office:value-type="string" office:string-value="" calcext:value-type="error">
            <text:p>#N/A</text:p>
          </table:table-cell>
          <table:table-cell office:value-type="string" calcext:value-type="string">
            <text:p>執筆</text:p>
          </table:table-cell>
          <table:table-cell table:formula="of:=IFERROR(VLOOKUP([.$Q237];[$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237];[$特性番号.$A$1:$特性番号.$B$8];2;0);0)" office:value-type="float" office:value="0" calcext:value-type="float">
            <text:p>0</text:p>
          </table:table-cell>
          <table:table-cell office:value-type="string" calcext:value-type="string">
            <text:p>これのイジン召喚に際し、これのレベルは、戦場の「執筆」を持つイジン1体につき1だけ下がる。¶執筆 - ハイケイが戦場に置かれるたび、相手の戦場のイジン1体を山札の下に戻す。</text:p>
          </table:table-cell>
          <table:table-cell table:style-name="ce8" office:value-type="string" calcext:value-type="string">
            <text:p>魔力化</text:p>
          </table:table-cell>
          <table:table-cell table:formula="of:=IFERROR(VLOOKUP([.$V237];[$遺業能力番号.$A$1:$遺業能力番号.$B$9];2;0);0)" office:value-type="float" office:value="1" calcext:value-type="float">
            <text:p>1</text:p>
          </table:table-cell>
          <table:table-cell office:value-type="string" calcext:value-type="string">
            <text:p>https://one-draw.jp/ijinden/cardlist/003/card/03_008.png</text:p>
          </table:table-cell>
          <table:table-cell table:formula="of:=CONCATENATE([$JSON.$A$1];[.$C237];[$JSON.$B$1];[.$E237];[$JSON.$C$1];[.$F237];[$JSON.$D$1];IF(ISNA([.$S237]);&quot;null&quot;;&quot;&quot;&quot;&quot;&amp;[.$S237]&amp;&quot;&quot;&quot;&quot;);[$JSON.$E$1];[.$U237];[$JSON.$F$1];IF(ISNA([.$V237]);&quot;null&quot;;&quot;&quot;&quot;&quot;&amp;[.$V237]&amp;&quot;&quot;&quot;&quot;);[$JSON.$G$1];[.$X237];[$JSON.$H$1];[.$H237];[$JSON.$I$1];[.J237];[$JSON.$J$1];[.$L237];[$JSON.$K$1];[.$O237];[$JSON.$L$1];[.$N237];[$JSON.$M$1];[.$R237];[$JSON.$N$1];[.$T237];[$JSON.$O$1];[.$W237];[$JSON.$P$1];[.$A237];[$JSON.$Q$1];[.$B237];[$JSON.$R$1])" office:value-type="string" office:string-value="{&quot;id&quot;:&quot;3-8&quot;,&quot;name&quot;:&quot;ジェーン・オースティン&quot;,&quot;kana&quot;:&quot;じぇーんおーすてぃん&quot;,&quot;traitText&quot;:null,&quot;ruleText&quot;:&quot;これのイジン召喚に際し、これのレベルは、戦場の「執筆」を持つイジン1体につき1だけ下がる。¶執筆 - ハイケイが戦場に置かれるたび、相手の戦場のイジン1体を山札の下に戻す。&quot;,&quot;legacyText&quot;:&quot;魔力化&quot;,&quot;imageUrl&quot;:&quot;https://one-draw.jp/ijinden/cardlist/003/card/03_008.png&quot;,&quot;expansion&quot;:35,&quot;rarity&quot;:4,&quot;type&quot;:1,&quot;level&quot;:8,&quot;color&quot;:8,&quot;term&quot;:2,&quot;trait&quot;:0,&quot;legacy&quot;:1,&quot;orderTable&quot;:236,&quot;orderDeck&quot;:226}," calcext:value-type="string">
            <text:p>{"id":"3-8","name":"ジェーン・オースティン","kana":"じぇーんおーすてぃん","traitText":null,"ruleText":"これのイジン召喚に際し、これのレベルは、戦場の「執筆」を持つイジン1体につき1だけ下がる。¶執筆 - ハイケイが戦場に置かれるたび、相手の戦場のイジン1体を山札の下に戻す。","legacyText":"魔力化","imageUrl":"https://one-draw.jp/ijinden/cardlist/003/card/03_008.png","expansion":35,"rarity":4,"type":1,"level":8,"color":8,"term":2,"trait":0,"legacy":1,"orderTable":236,"orderDeck":226},</text:p>
          </table:table-cell>
          <table:table-cell table:number-columns-repeated="16347"/>
        </table:table-row>
        <table:table-row table:style-name="ro2">
          <table:table-cell office:value-type="float" office:value="237" calcext:value-type="float">
            <text:p>237</text:p>
          </table:table-cell>
          <table:table-cell office:value-type="float" office:value="200" calcext:value-type="float">
            <text:p>200</text:p>
          </table:table-cell>
          <table:table-cell office:value-type="string" calcext:value-type="string">
            <text:p>3-9</text:p>
          </table:table-cell>
          <table:table-cell office:value-type="float" office:value="9" calcext:value-type="float">
            <text:p>9</text:p>
          </table:table-cell>
          <table:table-cell office:value-type="string" calcext:value-type="string">
            <text:p>土方歳三</text:p>
          </table:table-cell>
          <table:table-cell office:value-type="string" calcext:value-type="string">
            <text:p>ひじかたとしぞう</text:p>
          </table:table-cell>
          <table:table-cell office:value-type="string" calcext:value-type="string">
            <text:p>第３弾ブースターパック</text:p>
          </table:table-cell>
          <table:table-cell table:formula="of:=VLOOKUP([.G238];[$収録番号.$A$1:$収録番号.$B$9];2;0)" office:value-type="float" office:value="35" calcext:value-type="float">
            <text:p>35</text:p>
          </table:table-cell>
          <table:table-cell office:value-type="string" calcext:value-type="string">
            <text:p>SR</text:p>
          </table:table-cell>
          <table:table-cell table:formula="of:=VLOOKUP([.I238];[$レアリティ番号.$A$1:$レアリティ番号.$B$4];2;0)" office:value-type="float" office:value="4" calcext:value-type="float">
            <text:p>4</text:p>
          </table:table-cell>
          <table:table-cell office:value-type="string" calcext:value-type="string">
            <text:p>イジン</text:p>
          </table:table-cell>
          <table:table-cell table:formula="of:=VLOOKUP([.K238];[$種類番号.$A$1:$種類番号.$B$4];2;0)" office:value-type="float" office:value="1" calcext:value-type="float">
            <text:p>1</text:p>
          </table:table-cell>
          <table:table-cell office:value-type="string" calcext:value-type="string">
            <text:p>紫</text:p>
          </table:table-cell>
          <table:table-cell table:formula="of:=VLOOKUP([.M238];[$色番号.$A$1:$色番号.$B$10];2;0)" office:value-type="float" office:value="16" calcext:value-type="float">
            <text:p>16</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38];[$能力語番号.$A$1:$能力語番号.$B$10];2;0);0)" office:value-type="float" office:value="0" calcext:value-type="float">
            <text:p>0</text:p>
          </table:table-cell>
          <table:table-cell office:value-type="string" calcext:value-type="string">
            <text:p>志願</text:p>
          </table:table-cell>
          <table:table-cell table:formula="of:=IFERROR(VLOOKUP([.$S238];[$特性番号.$A$1:$特性番号.$B$8];2;0);0)" office:value-type="float" office:value="32" calcext:value-type="float">
            <text:p>32</text:p>
          </table:table-cell>
          <table:table-cell office:value-type="string" calcext:value-type="string">
            <text:p>戦場に置かれたとき、自分の戦場の「志願」イジンとガーディアンを合わせた数と同じだけ「自分はドローする」か「相手はドローする」のどちらかを発揮する。¶戦場に置かれたとき、ガーディアンが自分の戦場にいないなら発動する。イジン召喚権+2する。</text:p>
          </table:table-cell>
          <table:table-cell table:style-name="ce8" office:value-type="string" calcext:value-type="string">
            <text:p>山札の上か下に戻す</text:p>
          </table:table-cell>
          <table:table-cell table:formula="of:=IFERROR(VLOOKUP([.$V238];[$遺業能力番号.$A$1:$遺業能力番号.$B$9];2;0);0)" office:value-type="float" office:value="7" calcext:value-type="float">
            <text:p>7</text:p>
          </table:table-cell>
          <table:table-cell office:value-type="string" calcext:value-type="string">
            <text:p>https://one-draw.jp/ijinden/cardlist/003/card/03_009.png</text:p>
          </table:table-cell>
          <table:table-cell table:formula="of:=CONCATENATE([$JSON.$A$1];[.$C238];[$JSON.$B$1];[.$E238];[$JSON.$C$1];[.$F238];[$JSON.$D$1];IF(ISNA([.$S238]);&quot;null&quot;;&quot;&quot;&quot;&quot;&amp;[.$S238]&amp;&quot;&quot;&quot;&quot;);[$JSON.$E$1];[.$U238];[$JSON.$F$1];IF(ISNA([.$V238]);&quot;null&quot;;&quot;&quot;&quot;&quot;&amp;[.$V238]&amp;&quot;&quot;&quot;&quot;);[$JSON.$G$1];[.$X238];[$JSON.$H$1];[.$H238];[$JSON.$I$1];[.J238];[$JSON.$J$1];[.$L238];[$JSON.$K$1];[.$O238];[$JSON.$L$1];[.$N238];[$JSON.$M$1];[.$R238];[$JSON.$N$1];[.$T238];[$JSON.$O$1];[.$W238];[$JSON.$P$1];[.$A238];[$JSON.$Q$1];[.$B238];[$JSON.$R$1])" office:value-type="string" office:string-value="{&quot;id&quot;:&quot;3-9&quot;,&quot;name&quot;:&quot;土方歳三&quot;,&quot;kana&quot;:&quot;ひじかたとしぞう&quot;,&quot;traitText&quot;:&quot;志願&quot;,&quot;ruleText&quot;:&quot;戦場に置かれたとき、自分の戦場の「志願」イジンとガーディアンを合わせた数と同じだけ「自分はドローする」か「相手はドローする」のどちらかを発揮する。¶戦場に置かれたとき、ガーディアンが自分の戦場にいないなら発動する。イジン召喚権+2する。&quot;,&quot;legacyText&quot;:&quot;山札の上か下に戻す&quot;,&quot;imageUrl&quot;:&quot;https://one-draw.jp/ijinden/cardlist/003/card/03_009.png&quot;,&quot;expansion&quot;:35,&quot;rarity&quot;:4,&quot;type&quot;:1,&quot;level&quot;:6,&quot;color&quot;:16,&quot;term&quot;:0,&quot;trait&quot;:32,&quot;legacy&quot;:7,&quot;orderTable&quot;:237,&quot;orderDeck&quot;:200}," calcext:value-type="string">
            <text:p>{"id":"3-9","name":"土方歳三","kana":"ひじかたとしぞう","traitText":"志願","ruleText":"戦場に置かれたとき、自分の戦場の「志願」イジンとガーディアンを合わせた数と同じだけ「自分はドローする」か「相手はドローする」のどちらかを発揮する。¶戦場に置かれたとき、ガーディアンが自分の戦場にいないなら発動する。イジン召喚権+2する。","legacyText":"山札の上か下に戻す","imageUrl":"https://one-draw.jp/ijinden/cardlist/003/card/03_009.png","expansion":35,"rarity":4,"type":1,"level":6,"color":16,"term":0,"trait":32,"legacy":7,"orderTable":237,"orderDeck":200},</text:p>
          </table:table-cell>
          <table:table-cell table:number-columns-repeated="16347"/>
        </table:table-row>
        <table:table-row table:style-name="ro2">
          <table:table-cell office:value-type="float" office:value="238" calcext:value-type="float">
            <text:p>238</text:p>
          </table:table-cell>
          <table:table-cell office:value-type="float" office:value="60" calcext:value-type="float">
            <text:p>60</text:p>
          </table:table-cell>
          <table:table-cell office:value-type="string" calcext:value-type="string">
            <text:p>3-10</text:p>
          </table:table-cell>
          <table:table-cell office:value-type="float" office:value="10" calcext:value-type="float">
            <text:p>10</text:p>
          </table:table-cell>
          <table:table-cell office:value-type="string" calcext:value-type="string">
            <text:p>武則天</text:p>
          </table:table-cell>
          <table:table-cell office:value-type="string" calcext:value-type="string">
            <text:p>ぶそくてん</text:p>
          </table:table-cell>
          <table:table-cell office:value-type="string" calcext:value-type="string">
            <text:p>第３弾ブースターパック</text:p>
          </table:table-cell>
          <table:table-cell table:formula="of:=VLOOKUP([.G239];[$収録番号.$A$1:$収録番号.$B$9];2;0)" office:value-type="float" office:value="35" calcext:value-type="float">
            <text:p>35</text:p>
          </table:table-cell>
          <table:table-cell office:value-type="string" calcext:value-type="string">
            <text:p>SR</text:p>
          </table:table-cell>
          <table:table-cell table:formula="of:=VLOOKUP([.I239];[$レアリティ番号.$A$1:$レアリティ番号.$B$4];2;0)" office:value-type="float" office:value="4" calcext:value-type="float">
            <text:p>4</text:p>
          </table:table-cell>
          <table:table-cell office:value-type="string" calcext:value-type="string">
            <text:p>イジン</text:p>
          </table:table-cell>
          <table:table-cell table:formula="of:=VLOOKUP([.K239];[$種類番号.$A$1:$種類番号.$B$4];2;0)" office:value-type="float" office:value="1" calcext:value-type="float">
            <text:p>1</text:p>
          </table:table-cell>
          <table:table-cell office:value-type="string" calcext:value-type="string">
            <text:p>紫</text:p>
          </table:table-cell>
          <table:table-cell table:formula="of:=VLOOKUP([.M239];[$色番号.$A$1:$色番号.$B$10];2;0)" office:value-type="float" office:value="16" calcext:value-type="float">
            <text:p>16</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3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39];[$特性番号.$A$1:$特性番号.$B$8];2;0);0)" office:value-type="float" office:value="0" calcext:value-type="float">
            <text:p>0</text:p>
          </table:table-cell>
          <table:table-cell office:value-type="string" calcext:value-type="string">
            <text:p>能力によって相手のマリョク配置権が増えたとき、相手の山札の上から1枚を墓地に置く。¶能力によって相手のイジン召喚権が増えたとき、相手の手札のカード1つを墓地に置く。そのカードは相手が選ぶ。</text:p>
          </table:table-cell>
          <table:table-cell table:style-name="ce8" office:value-type="string" calcext:value-type="string">
            <text:p>1ドローする</text:p>
          </table:table-cell>
          <table:table-cell table:formula="of:=IFERROR(VLOOKUP([.$V239];[$遺業能力番号.$A$1:$遺業能力番号.$B$9];2;0);0)" office:value-type="float" office:value="4" calcext:value-type="float">
            <text:p>4</text:p>
          </table:table-cell>
          <table:table-cell office:value-type="string" calcext:value-type="string">
            <text:p>https://one-draw.jp/ijinden/cardlist/003/card/03_010.png</text:p>
          </table:table-cell>
          <table:table-cell table:formula="of:=CONCATENATE([$JSON.$A$1];[.$C239];[$JSON.$B$1];[.$E239];[$JSON.$C$1];[.$F239];[$JSON.$D$1];IF(ISNA([.$S239]);&quot;null&quot;;&quot;&quot;&quot;&quot;&amp;[.$S239]&amp;&quot;&quot;&quot;&quot;);[$JSON.$E$1];[.$U239];[$JSON.$F$1];IF(ISNA([.$V239]);&quot;null&quot;;&quot;&quot;&quot;&quot;&amp;[.$V239]&amp;&quot;&quot;&quot;&quot;);[$JSON.$G$1];[.$X239];[$JSON.$H$1];[.$H239];[$JSON.$I$1];[.J239];[$JSON.$J$1];[.$L239];[$JSON.$K$1];[.$O239];[$JSON.$L$1];[.$N239];[$JSON.$M$1];[.$R239];[$JSON.$N$1];[.$T239];[$JSON.$O$1];[.$W239];[$JSON.$P$1];[.$A239];[$JSON.$Q$1];[.$B239];[$JSON.$R$1])" office:value-type="string" office:string-value="{&quot;id&quot;:&quot;3-10&quot;,&quot;name&quot;:&quot;武則天&quot;,&quot;kana&quot;:&quot;ぶそくてん&quot;,&quot;traitText&quot;:null,&quot;ruleText&quot;:&quot;能力によって相手のマリョク配置権が増えたとき、相手の山札の上から1枚を墓地に置く。¶能力によって相手のイジン召喚権が増えたとき、相手の手札のカード1つを墓地に置く。そのカードは相手が選ぶ。&quot;,&quot;legacyText&quot;:&quot;1ドローする&quot;,&quot;imageUrl&quot;:&quot;https://one-draw.jp/ijinden/cardlist/003/card/03_010.png&quot;,&quot;expansion&quot;:35,&quot;rarity&quot;:4,&quot;type&quot;:1,&quot;level&quot;:2,&quot;color&quot;:16,&quot;term&quot;:0,&quot;trait&quot;:0,&quot;legacy&quot;:4,&quot;orderTable&quot;:238,&quot;orderDeck&quot;:60}," calcext:value-type="string">
            <text:p>{"id":"3-10","name":"武則天","kana":"ぶそくてん","traitText":null,"ruleText":"能力によって相手のマリョク配置権が増えたとき、相手の山札の上から1枚を墓地に置く。¶能力によって相手のイジン召喚権が増えたとき、相手の手札のカード1つを墓地に置く。そのカードは相手が選ぶ。","legacyText":"1ドローする","imageUrl":"https://one-draw.jp/ijinden/cardlist/003/card/03_010.png","expansion":35,"rarity":4,"type":1,"level":2,"color":16,"term":0,"trait":0,"legacy":4,"orderTable":238,"orderDeck":60},</text:p>
          </table:table-cell>
          <table:table-cell table:number-columns-repeated="16347"/>
        </table:table-row>
        <table:table-row table:style-name="ro2">
          <table:table-cell office:value-type="float" office:value="239" calcext:value-type="float">
            <text:p>239</text:p>
          </table:table-cell>
          <table:table-cell office:value-type="float" office:value="112" calcext:value-type="float">
            <text:p>112</text:p>
          </table:table-cell>
          <table:table-cell office:value-type="string" calcext:value-type="string">
            <text:p>3-11</text:p>
          </table:table-cell>
          <table:table-cell office:value-type="float" office:value="11" calcext:value-type="float">
            <text:p>11</text:p>
          </table:table-cell>
          <table:table-cell office:value-type="string" calcext:value-type="string">
            <text:p>ウィリアム・セシル</text:p>
          </table:table-cell>
          <table:table-cell office:value-type="string" calcext:value-type="string">
            <text:p>うぃりあむせしる</text:p>
          </table:table-cell>
          <table:table-cell office:value-type="string" calcext:value-type="string">
            <text:p>第３弾ブースターパック</text:p>
          </table:table-cell>
          <table:table-cell table:formula="of:=VLOOKUP([.G240];[$収録番号.$A$1:$収録番号.$B$9];2;0)" office:value-type="float" office:value="35" calcext:value-type="float">
            <text:p>35</text:p>
          </table:table-cell>
          <table:table-cell office:value-type="string" calcext:value-type="string">
            <text:p>N</text:p>
          </table:table-cell>
          <table:table-cell table:formula="of:=VLOOKUP([.I240];[$レアリティ番号.$A$1:$レアリティ番号.$B$4];2;0)" office:value-type="float" office:value="1" calcext:value-type="float">
            <text:p>1</text:p>
          </table:table-cell>
          <table:table-cell office:value-type="string" calcext:value-type="string">
            <text:p>イジン</text:p>
          </table:table-cell>
          <table:table-cell table:formula="of:=VLOOKUP([.K240];[$種類番号.$A$1:$種類番号.$B$4];2;0)" office:value-type="float" office:value="1" calcext:value-type="float">
            <text:p>1</text:p>
          </table:table-cell>
          <table:table-cell office:value-type="string" calcext:value-type="string">
            <text:p>赤</text:p>
          </table:table-cell>
          <table:table-cell table:formula="of:=VLOOKUP([.M240];[$色番号.$A$1:$色番号.$B$10];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4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40];[$特性番号.$A$1:$特性番号.$B$8];2;0);0)" office:value-type="float" office:value="0" calcext:value-type="float">
            <text:p>0</text:p>
          </table:table-cell>
          <table:table-cell office:value-type="string" calcext:value-type="string">
            <text:p>スタンド¶戦場に置かれたとき、1ドローする。</text:p>
          </table:table-cell>
          <table:table-cell table:style-name="ce8" office:value-type="string" calcext:value-type="string">
            <text:p>1ドローする</text:p>
          </table:table-cell>
          <table:table-cell table:formula="of:=IFERROR(VLOOKUP([.$V240];[$遺業能力番号.$A$1:$遺業能力番号.$B$9];2;0);0)" office:value-type="float" office:value="4" calcext:value-type="float">
            <text:p>4</text:p>
          </table:table-cell>
          <table:table-cell office:value-type="string" calcext:value-type="string">
            <text:p>https://one-draw.jp/ijinden/cardlist/003/card/03_011.png</text:p>
          </table:table-cell>
          <table:table-cell table:formula="of:=CONCATENATE([$JSON.$A$1];[.$C240];[$JSON.$B$1];[.$E240];[$JSON.$C$1];[.$F240];[$JSON.$D$1];IF(ISNA([.$S240]);&quot;null&quot;;&quot;&quot;&quot;&quot;&amp;[.$S240]&amp;&quot;&quot;&quot;&quot;);[$JSON.$E$1];[.$U240];[$JSON.$F$1];IF(ISNA([.$V240]);&quot;null&quot;;&quot;&quot;&quot;&quot;&amp;[.$V240]&amp;&quot;&quot;&quot;&quot;);[$JSON.$G$1];[.$X240];[$JSON.$H$1];[.$H240];[$JSON.$I$1];[.J240];[$JSON.$J$1];[.$L240];[$JSON.$K$1];[.$O240];[$JSON.$L$1];[.$N240];[$JSON.$M$1];[.$R240];[$JSON.$N$1];[.$T240];[$JSON.$O$1];[.$W240];[$JSON.$P$1];[.$A240];[$JSON.$Q$1];[.$B240];[$JSON.$R$1])" office:value-type="string" office:string-value="{&quot;id&quot;:&quot;3-11&quot;,&quot;name&quot;:&quot;ウィリアム・セシル&quot;,&quot;kana&quot;:&quot;うぃりあむせしる&quot;,&quot;traitText&quot;:null,&quot;ruleText&quot;:&quot;スタンド¶戦場に置かれたとき、1ドローする。&quot;,&quot;legacyText&quot;:&quot;1ドローする&quot;,&quot;imageUrl&quot;:&quot;https://one-draw.jp/ijinden/cardlist/003/card/03_011.png&quot;,&quot;expansion&quot;:35,&quot;rarity&quot;:1,&quot;type&quot;:1,&quot;level&quot;:4,&quot;color&quot;:1,&quot;term&quot;:0,&quot;trait&quot;:0,&quot;legacy&quot;:4,&quot;orderTable&quot;:239,&quot;orderDeck&quot;:112}," calcext:value-type="string">
            <text:p>{"id":"3-11","name":"ウィリアム・セシル","kana":"うぃりあむせしる","traitText":null,"ruleText":"スタンド¶戦場に置かれたとき、1ドローする。","legacyText":"1ドローする","imageUrl":"https://one-draw.jp/ijinden/cardlist/003/card/03_011.png","expansion":35,"rarity":1,"type":1,"level":4,"color":1,"term":0,"trait":0,"legacy":4,"orderTable":239,"orderDeck":112},</text:p>
          </table:table-cell>
          <table:table-cell table:number-columns-repeated="16347"/>
        </table:table-row>
        <table:table-row table:style-name="ro2">
          <table:table-cell office:value-type="float" office:value="240" calcext:value-type="float">
            <text:p>240</text:p>
          </table:table-cell>
          <table:table-cell office:value-type="float" office:value="71" calcext:value-type="float">
            <text:p>71</text:p>
          </table:table-cell>
          <table:table-cell office:value-type="string" calcext:value-type="string">
            <text:p>3-12</text:p>
          </table:table-cell>
          <table:table-cell office:value-type="float" office:value="12" calcext:value-type="float">
            <text:p>12</text:p>
          </table:table-cell>
          <table:table-cell office:value-type="string" calcext:value-type="string">
            <text:p>イーライ・ホイットニー</text:p>
          </table:table-cell>
          <table:table-cell office:value-type="string" calcext:value-type="string">
            <text:p>いーらいほいっとにー</text:p>
          </table:table-cell>
          <table:table-cell office:value-type="string" calcext:value-type="string">
            <text:p>第３弾ブースターパック</text:p>
          </table:table-cell>
          <table:table-cell table:formula="of:=VLOOKUP([.G241];[$収録番号.$A$1:$収録番号.$B$9];2;0)" office:value-type="float" office:value="35" calcext:value-type="float">
            <text:p>35</text:p>
          </table:table-cell>
          <table:table-cell office:value-type="string" calcext:value-type="string">
            <text:p>N</text:p>
          </table:table-cell>
          <table:table-cell table:formula="of:=VLOOKUP([.I241];[$レアリティ番号.$A$1:$レアリティ番号.$B$4];2;0)" office:value-type="float" office:value="1" calcext:value-type="float">
            <text:p>1</text:p>
          </table:table-cell>
          <table:table-cell office:value-type="string" calcext:value-type="string">
            <text:p>イジン</text:p>
          </table:table-cell>
          <table:table-cell table:formula="of:=VLOOKUP([.K241];[$種類番号.$A$1:$種類番号.$B$4];2;0)" office:value-type="float" office:value="1" calcext:value-type="float">
            <text:p>1</text:p>
          </table:table-cell>
          <table:table-cell office:value-type="string" calcext:value-type="string">
            <text:p>赤</text:p>
          </table:table-cell>
          <table:table-cell table:formula="of:=VLOOKUP([.M241];[$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4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41];[$特性番号.$A$1:$特性番号.$B$8];2;0);0)" office:value-type="float" office:value="0" calcext:value-type="float">
            <text:p>0</text:p>
          </table:table-cell>
          <table:table-cell office:value-type="string" calcext:value-type="string">
            <text:p>戦場に置かれたとき、自分の魔力ゾーンの裏のカード1つを手札に戻して発動できる。相手の戦場のパワー3000以下のイジン1体を破壊する。</text:p>
          </table:table-cell>
          <table:table-cell table:style-name="ce8" office:value-type="string" calcext:value-type="string">
            <text:p>1ドローする</text:p>
          </table:table-cell>
          <table:table-cell table:formula="of:=IFERROR(VLOOKUP([.$V241];[$遺業能力番号.$A$1:$遺業能力番号.$B$9];2;0);0)" office:value-type="float" office:value="4" calcext:value-type="float">
            <text:p>4</text:p>
          </table:table-cell>
          <table:table-cell office:value-type="string" calcext:value-type="string">
            <text:p>https://one-draw.jp/ijinden/cardlist/003/card/03_012.png</text:p>
          </table:table-cell>
          <table:table-cell table:formula="of:=CONCATENATE([$JSON.$A$1];[.$C241];[$JSON.$B$1];[.$E241];[$JSON.$C$1];[.$F241];[$JSON.$D$1];IF(ISNA([.$S241]);&quot;null&quot;;&quot;&quot;&quot;&quot;&amp;[.$S241]&amp;&quot;&quot;&quot;&quot;);[$JSON.$E$1];[.$U241];[$JSON.$F$1];IF(ISNA([.$V241]);&quot;null&quot;;&quot;&quot;&quot;&quot;&amp;[.$V241]&amp;&quot;&quot;&quot;&quot;);[$JSON.$G$1];[.$X241];[$JSON.$H$1];[.$H241];[$JSON.$I$1];[.J241];[$JSON.$J$1];[.$L241];[$JSON.$K$1];[.$O241];[$JSON.$L$1];[.$N241];[$JSON.$M$1];[.$R241];[$JSON.$N$1];[.$T241];[$JSON.$O$1];[.$W241];[$JSON.$P$1];[.$A241];[$JSON.$Q$1];[.$B241];[$JSON.$R$1])" office:value-type="string" office:string-value="{&quot;id&quot;:&quot;3-12&quot;,&quot;name&quot;:&quot;イーライ・ホイットニー&quot;,&quot;kana&quot;:&quot;いーらいほいっとにー&quot;,&quot;traitText&quot;:null,&quot;ruleText&quot;:&quot;戦場に置かれたとき、自分の魔力ゾーンの裏のカード1つを手札に戻して発動できる。相手の戦場のパワー3000以下のイジン1体を破壊する。&quot;,&quot;legacyText&quot;:&quot;1ドローする&quot;,&quot;imageUrl&quot;:&quot;https://one-draw.jp/ijinden/cardlist/003/card/03_012.png&quot;,&quot;expansion&quot;:35,&quot;rarity&quot;:1,&quot;type&quot;:1,&quot;level&quot;:3,&quot;color&quot;:1,&quot;term&quot;:0,&quot;trait&quot;:0,&quot;legacy&quot;:4,&quot;orderTable&quot;:240,&quot;orderDeck&quot;:71}," calcext:value-type="string">
            <text:p>{"id":"3-12","name":"イーライ・ホイットニー","kana":"いーらいほいっとにー","traitText":null,"ruleText":"戦場に置かれたとき、自分の魔力ゾーンの裏のカード1つを手札に戻して発動できる。相手の戦場のパワー3000以下のイジン1体を破壊する。","legacyText":"1ドローする","imageUrl":"https://one-draw.jp/ijinden/cardlist/003/card/03_012.png","expansion":35,"rarity":1,"type":1,"level":3,"color":1,"term":0,"trait":0,"legacy":4,"orderTable":240,"orderDeck":71},</text:p>
          </table:table-cell>
          <table:table-cell table:number-columns-repeated="16347"/>
        </table:table-row>
        <table:table-row table:style-name="ro2">
          <table:table-cell office:value-type="float" office:value="241" calcext:value-type="float">
            <text:p>241</text:p>
          </table:table-cell>
          <table:table-cell office:value-type="float" office:value="29" calcext:value-type="float">
            <text:p>29</text:p>
          </table:table-cell>
          <table:table-cell office:value-type="string" calcext:value-type="string">
            <text:p>3-13</text:p>
          </table:table-cell>
          <table:table-cell office:value-type="float" office:value="13" calcext:value-type="float">
            <text:p>13</text:p>
          </table:table-cell>
          <table:table-cell office:value-type="string" calcext:value-type="string">
            <text:p>平賀源内</text:p>
          </table:table-cell>
          <table:table-cell office:value-type="string" calcext:value-type="string">
            <text:p>ひらがげんない</text:p>
          </table:table-cell>
          <table:table-cell office:value-type="string" calcext:value-type="string">
            <text:p>第３弾ブースターパック</text:p>
          </table:table-cell>
          <table:table-cell table:formula="of:=VLOOKUP([.G242];[$収録番号.$A$1:$収録番号.$B$9];2;0)" office:value-type="float" office:value="35" calcext:value-type="float">
            <text:p>35</text:p>
          </table:table-cell>
          <table:table-cell office:value-type="string" calcext:value-type="string">
            <text:p>N</text:p>
          </table:table-cell>
          <table:table-cell table:formula="of:=VLOOKUP([.I242];[$レアリティ番号.$A$1:$レアリティ番号.$B$4];2;0)" office:value-type="float" office:value="1" calcext:value-type="float">
            <text:p>1</text:p>
          </table:table-cell>
          <table:table-cell office:value-type="string" calcext:value-type="string">
            <text:p>イジン</text:p>
          </table:table-cell>
          <table:table-cell table:formula="of:=VLOOKUP([.K242];[$種類番号.$A$1:$種類番号.$B$4];2;0)" office:value-type="float" office:value="1" calcext:value-type="float">
            <text:p>1</text:p>
          </table:table-cell>
          <table:table-cell office:value-type="string" calcext:value-type="string">
            <text:p>赤</text:p>
          </table:table-cell>
          <table:table-cell table:formula="of:=VLOOKUP([.M242];[$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4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42];[$特性番号.$A$1:$特性番号.$B$8];2;0);0)" office:value-type="float" office:value="0" calcext:value-type="float">
            <text:p>0</text:p>
          </table:table-cell>
          <table:table-cell office:value-type="string" calcext:value-type="string">
            <text:p>戦場に置かれたとき、自分の魔力ゾーンのマリョク1つを裏にして、相手の戦場のパワー1000以下のイジン1体か、相手の戦場のハイケイ1つを指定して発動できる。そのイジンかハイケイを破壊する。</text:p>
          </table:table-cell>
          <table:table-cell table:style-name="ce8" office:value-type="string" calcext:value-type="string">
            <text:p>1ドローする</text:p>
          </table:table-cell>
          <table:table-cell table:formula="of:=IFERROR(VLOOKUP([.$V242];[$遺業能力番号.$A$1:$遺業能力番号.$B$9];2;0);0)" office:value-type="float" office:value="4" calcext:value-type="float">
            <text:p>4</text:p>
          </table:table-cell>
          <table:table-cell office:value-type="string" calcext:value-type="string">
            <text:p>https://one-draw.jp/ijinden/cardlist/003/card/03_013.png</text:p>
          </table:table-cell>
          <table:table-cell table:formula="of:=CONCATENATE([$JSON.$A$1];[.$C242];[$JSON.$B$1];[.$E242];[$JSON.$C$1];[.$F242];[$JSON.$D$1];IF(ISNA([.$S242]);&quot;null&quot;;&quot;&quot;&quot;&quot;&amp;[.$S242]&amp;&quot;&quot;&quot;&quot;);[$JSON.$E$1];[.$U242];[$JSON.$F$1];IF(ISNA([.$V242]);&quot;null&quot;;&quot;&quot;&quot;&quot;&amp;[.$V242]&amp;&quot;&quot;&quot;&quot;);[$JSON.$G$1];[.$X242];[$JSON.$H$1];[.$H242];[$JSON.$I$1];[.J242];[$JSON.$J$1];[.$L242];[$JSON.$K$1];[.$O242];[$JSON.$L$1];[.$N242];[$JSON.$M$1];[.$R242];[$JSON.$N$1];[.$T242];[$JSON.$O$1];[.$W242];[$JSON.$P$1];[.$A242];[$JSON.$Q$1];[.$B242];[$JSON.$R$1])" office:value-type="string" office:string-value="{&quot;id&quot;:&quot;3-13&quot;,&quot;name&quot;:&quot;平賀源内&quot;,&quot;kana&quot;:&quot;ひらがげんない&quot;,&quot;traitText&quot;:null,&quot;ruleText&quot;:&quot;戦場に置かれたとき、自分の魔力ゾーンのマリョク1つを裏にして、相手の戦場のパワー1000以下のイジン1体か、相手の戦場のハイケイ1つを指定して発動できる。そのイジンかハイケイを破壊する。&quot;,&quot;legacyText&quot;:&quot;1ドローする&quot;,&quot;imageUrl&quot;:&quot;https://one-draw.jp/ijinden/cardlist/003/card/03_013.png&quot;,&quot;expansion&quot;:35,&quot;rarity&quot;:1,&quot;type&quot;:1,&quot;level&quot;:2,&quot;color&quot;:1,&quot;term&quot;:0,&quot;trait&quot;:0,&quot;legacy&quot;:4,&quot;orderTable&quot;:241,&quot;orderDeck&quot;:29}," calcext:value-type="string">
            <text:p>{"id":"3-13","name":"平賀源内","kana":"ひらがげんない","traitText":null,"ruleText":"戦場に置かれたとき、自分の魔力ゾーンのマリョク1つを裏にして、相手の戦場のパワー1000以下のイジン1体か、相手の戦場のハイケイ1つを指定して発動できる。そのイジンかハイケイを破壊する。","legacyText":"1ドローする","imageUrl":"https://one-draw.jp/ijinden/cardlist/003/card/03_013.png","expansion":35,"rarity":1,"type":1,"level":2,"color":1,"term":0,"trait":0,"legacy":4,"orderTable":241,"orderDeck":29},</text:p>
          </table:table-cell>
          <table:table-cell table:number-columns-repeated="16347"/>
        </table:table-row>
        <table:table-row table:style-name="ro2">
          <table:table-cell office:value-type="float" office:value="242" calcext:value-type="float">
            <text:p>242</text:p>
          </table:table-cell>
          <table:table-cell office:value-type="float" office:value="72" calcext:value-type="float">
            <text:p>72</text:p>
          </table:table-cell>
          <table:table-cell office:value-type="string" calcext:value-type="string">
            <text:p>3-14</text:p>
          </table:table-cell>
          <table:table-cell office:value-type="float" office:value="14" calcext:value-type="float">
            <text:p>14</text:p>
          </table:table-cell>
          <table:table-cell office:value-type="string" calcext:value-type="string">
            <text:p>ジョージ・スチーブンソン</text:p>
          </table:table-cell>
          <table:table-cell office:value-type="string" calcext:value-type="string">
            <text:p>じょーじすちーぶんそん</text:p>
          </table:table-cell>
          <table:table-cell office:value-type="string" calcext:value-type="string">
            <text:p>第３弾ブースターパック</text:p>
          </table:table-cell>
          <table:table-cell table:formula="of:=VLOOKUP([.G243];[$収録番号.$A$1:$収録番号.$B$9];2;0)" office:value-type="float" office:value="35" calcext:value-type="float">
            <text:p>35</text:p>
          </table:table-cell>
          <table:table-cell office:value-type="string" calcext:value-type="string">
            <text:p>N</text:p>
          </table:table-cell>
          <table:table-cell table:formula="of:=VLOOKUP([.I243];[$レアリティ番号.$A$1:$レアリティ番号.$B$4];2;0)" office:value-type="float" office:value="1" calcext:value-type="float">
            <text:p>1</text:p>
          </table:table-cell>
          <table:table-cell office:value-type="string" calcext:value-type="string">
            <text:p>イジン</text:p>
          </table:table-cell>
          <table:table-cell table:formula="of:=VLOOKUP([.K243];[$種類番号.$A$1:$種類番号.$B$4];2;0)" office:value-type="float" office:value="1" calcext:value-type="float">
            <text:p>1</text:p>
          </table:table-cell>
          <table:table-cell office:value-type="string" calcext:value-type="string">
            <text:p>赤</text:p>
          </table:table-cell>
          <table:table-cell table:formula="of:=VLOOKUP([.M243];[$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4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43];[$特性番号.$A$1:$特性番号.$B$8];2;0);0)" office:value-type="float" office:value="0" calcext:value-type="float">
            <text:p>0</text:p>
          </table:table-cell>
          <table:table-cell office:value-type="string" calcext:value-type="string">
            <text:p>戦場に置かれたとき、自分の魔力ゾーンの裏のカード1つを手札に戻して発動できる。マリョク配置権+1する。</text:p>
          </table:table-cell>
          <table:table-cell table:style-name="ce8" office:value-type="string" calcext:value-type="string">
            <text:p>1ドローする</text:p>
          </table:table-cell>
          <table:table-cell table:formula="of:=IFERROR(VLOOKUP([.$V243];[$遺業能力番号.$A$1:$遺業能力番号.$B$9];2;0);0)" office:value-type="float" office:value="4" calcext:value-type="float">
            <text:p>4</text:p>
          </table:table-cell>
          <table:table-cell office:value-type="string" calcext:value-type="string">
            <text:p>https://one-draw.jp/ijinden/cardlist/003/card/03_014.png</text:p>
          </table:table-cell>
          <table:table-cell table:formula="of:=CONCATENATE([$JSON.$A$1];[.$C243];[$JSON.$B$1];[.$E243];[$JSON.$C$1];[.$F243];[$JSON.$D$1];IF(ISNA([.$S243]);&quot;null&quot;;&quot;&quot;&quot;&quot;&amp;[.$S243]&amp;&quot;&quot;&quot;&quot;);[$JSON.$E$1];[.$U243];[$JSON.$F$1];IF(ISNA([.$V243]);&quot;null&quot;;&quot;&quot;&quot;&quot;&amp;[.$V243]&amp;&quot;&quot;&quot;&quot;);[$JSON.$G$1];[.$X243];[$JSON.$H$1];[.$H243];[$JSON.$I$1];[.J243];[$JSON.$J$1];[.$L243];[$JSON.$K$1];[.$O243];[$JSON.$L$1];[.$N243];[$JSON.$M$1];[.$R243];[$JSON.$N$1];[.$T243];[$JSON.$O$1];[.$W243];[$JSON.$P$1];[.$A243];[$JSON.$Q$1];[.$B243];[$JSON.$R$1])" office:value-type="string" office:string-value="{&quot;id&quot;:&quot;3-14&quot;,&quot;name&quot;:&quot;ジョージ・スチーブンソン&quot;,&quot;kana&quot;:&quot;じょーじすちーぶんそん&quot;,&quot;traitText&quot;:null,&quot;ruleText&quot;:&quot;戦場に置かれたとき、自分の魔力ゾーンの裏のカード1つを手札に戻して発動できる。マリョク配置権+1する。&quot;,&quot;legacyText&quot;:&quot;1ドローする&quot;,&quot;imageUrl&quot;:&quot;https://one-draw.jp/ijinden/cardlist/003/card/03_014.png&quot;,&quot;expansion&quot;:35,&quot;rarity&quot;:1,&quot;type&quot;:1,&quot;level&quot;:3,&quot;color&quot;:1,&quot;term&quot;:0,&quot;trait&quot;:0,&quot;legacy&quot;:4,&quot;orderTable&quot;:242,&quot;orderDeck&quot;:72}," calcext:value-type="string">
            <text:p>{"id":"3-14","name":"ジョージ・スチーブンソン","kana":"じょーじすちーぶんそん","traitText":null,"ruleText":"戦場に置かれたとき、自分の魔力ゾーンの裏のカード1つを手札に戻して発動できる。マリョク配置権+1する。","legacyText":"1ドローする","imageUrl":"https://one-draw.jp/ijinden/cardlist/003/card/03_014.png","expansion":35,"rarity":1,"type":1,"level":3,"color":1,"term":0,"trait":0,"legacy":4,"orderTable":242,"orderDeck":72},</text:p>
          </table:table-cell>
          <table:table-cell table:number-columns-repeated="16347"/>
        </table:table-row>
        <table:table-row table:style-name="ro2">
          <table:table-cell office:value-type="float" office:value="243" calcext:value-type="float">
            <text:p>243</text:p>
          </table:table-cell>
          <table:table-cell office:value-type="float" office:value="151" calcext:value-type="float">
            <text:p>151</text:p>
          </table:table-cell>
          <table:table-cell office:value-type="string" calcext:value-type="string">
            <text:p>3-15</text:p>
          </table:table-cell>
          <table:table-cell office:value-type="float" office:value="15" calcext:value-type="float">
            <text:p>15</text:p>
          </table:table-cell>
          <table:table-cell office:value-type="string" calcext:value-type="string">
            <text:p>淀殿</text:p>
          </table:table-cell>
          <table:table-cell office:value-type="string" calcext:value-type="string">
            <text:p>よどどの</text:p>
          </table:table-cell>
          <table:table-cell office:value-type="string" calcext:value-type="string">
            <text:p>第３弾ブースターパック</text:p>
          </table:table-cell>
          <table:table-cell table:formula="of:=VLOOKUP([.G244];[$収録番号.$A$1:$収録番号.$B$9];2;0)" office:value-type="float" office:value="35" calcext:value-type="float">
            <text:p>35</text:p>
          </table:table-cell>
          <table:table-cell office:value-type="string" calcext:value-type="string">
            <text:p>R</text:p>
          </table:table-cell>
          <table:table-cell table:formula="of:=VLOOKUP([.I244];[$レアリティ番号.$A$1:$レアリティ番号.$B$4];2;0)" office:value-type="float" office:value="2" calcext:value-type="float">
            <text:p>2</text:p>
          </table:table-cell>
          <table:table-cell office:value-type="string" calcext:value-type="string">
            <text:p>イジン</text:p>
          </table:table-cell>
          <table:table-cell table:formula="of:=VLOOKUP([.K244];[$種類番号.$A$1:$種類番号.$B$4];2;0)" office:value-type="float" office:value="1" calcext:value-type="float">
            <text:p>1</text:p>
          </table:table-cell>
          <table:table-cell office:value-type="string" calcext:value-type="string">
            <text:p>赤</text:p>
          </table:table-cell>
          <table:table-cell table:formula="of:=VLOOKUP([.M244];[$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4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44];[$特性番号.$A$1:$特性番号.$B$8];2;0);0)" office:value-type="float" office:value="0" calcext:value-type="float">
            <text:p>0</text:p>
          </table:table-cell>
          <table:table-cell office:value-type="string" calcext:value-type="string">
            <text:p>自分が1体だけでアタックしたとき、戦場のハイケイ3つまでを指定して発動できる。それらのハイケイすべてを破壊する。¶カードが魔力ゾーンに5つ以上ある間、相手の墓地のハイケイは、能力によって墓地を離れない。</text:p>
          </table:table-cell>
          <table:table-cell table:style-name="ce8" office:value-type="string" calcext:value-type="string">
            <text:p>1ドローする</text:p>
          </table:table-cell>
          <table:table-cell table:formula="of:=IFERROR(VLOOKUP([.$V244];[$遺業能力番号.$A$1:$遺業能力番号.$B$9];2;0);0)" office:value-type="float" office:value="4" calcext:value-type="float">
            <text:p>4</text:p>
          </table:table-cell>
          <table:table-cell office:value-type="string" calcext:value-type="string">
            <text:p>https://one-draw.jp/ijinden/cardlist/003/card/03_015.png</text:p>
          </table:table-cell>
          <table:table-cell table:formula="of:=CONCATENATE([$JSON.$A$1];[.$C244];[$JSON.$B$1];[.$E244];[$JSON.$C$1];[.$F244];[$JSON.$D$1];IF(ISNA([.$S244]);&quot;null&quot;;&quot;&quot;&quot;&quot;&amp;[.$S244]&amp;&quot;&quot;&quot;&quot;);[$JSON.$E$1];[.$U244];[$JSON.$F$1];IF(ISNA([.$V244]);&quot;null&quot;;&quot;&quot;&quot;&quot;&amp;[.$V244]&amp;&quot;&quot;&quot;&quot;);[$JSON.$G$1];[.$X244];[$JSON.$H$1];[.$H244];[$JSON.$I$1];[.J244];[$JSON.$J$1];[.$L244];[$JSON.$K$1];[.$O244];[$JSON.$L$1];[.$N244];[$JSON.$M$1];[.$R244];[$JSON.$N$1];[.$T244];[$JSON.$O$1];[.$W244];[$JSON.$P$1];[.$A244];[$JSON.$Q$1];[.$B244];[$JSON.$R$1])" office:value-type="string" office:string-value="{&quot;id&quot;:&quot;3-15&quot;,&quot;name&quot;:&quot;淀殿&quot;,&quot;kana&quot;:&quot;よどどの&quot;,&quot;traitText&quot;:null,&quot;ruleText&quot;:&quot;自分が1体だけでアタックしたとき、戦場のハイケイ3つまでを指定して発動できる。それらのハイケイすべてを破壊する。¶カードが魔力ゾーンに5つ以上ある間、相手の墓地のハイケイは、能力によって墓地を離れない。&quot;,&quot;legacyText&quot;:&quot;1ドローする&quot;,&quot;imageUrl&quot;:&quot;https://one-draw.jp/ijinden/cardlist/003/card/03_015.png&quot;,&quot;expansion&quot;:35,&quot;rarity&quot;:2,&quot;type&quot;:1,&quot;level&quot;:5,&quot;color&quot;:1,&quot;term&quot;:0,&quot;trait&quot;:0,&quot;legacy&quot;:4,&quot;orderTable&quot;:243,&quot;orderDeck&quot;:151}," calcext:value-type="string">
            <text:p>{"id":"3-15","name":"淀殿","kana":"よどどの","traitText":null,"ruleText":"自分が1体だけでアタックしたとき、戦場のハイケイ3つまでを指定して発動できる。それらのハイケイすべてを破壊する。¶カードが魔力ゾーンに5つ以上ある間、相手の墓地のハイケイは、能力によって墓地を離れない。","legacyText":"1ドローする","imageUrl":"https://one-draw.jp/ijinden/cardlist/003/card/03_015.png","expansion":35,"rarity":2,"type":1,"level":5,"color":1,"term":0,"trait":0,"legacy":4,"orderTable":243,"orderDeck":151},</text:p>
          </table:table-cell>
          <table:table-cell table:number-columns-repeated="16347"/>
        </table:table-row>
        <table:table-row table:style-name="ro2">
          <table:table-cell office:value-type="float" office:value="244" calcext:value-type="float">
            <text:p>244</text:p>
          </table:table-cell>
          <table:table-cell office:value-type="float" office:value="5" calcext:value-type="float">
            <text:p>5</text:p>
          </table:table-cell>
          <table:table-cell office:value-type="string" calcext:value-type="string">
            <text:p>3-16</text:p>
          </table:table-cell>
          <table:table-cell office:value-type="float" office:value="16" calcext:value-type="float">
            <text:p>16</text:p>
          </table:table-cell>
          <table:table-cell office:value-type="string" calcext:value-type="string">
            <text:p>ジョージ・ワシントン</text:p>
          </table:table-cell>
          <table:table-cell office:value-type="string" calcext:value-type="string">
            <text:p>じょーじわしんとん</text:p>
          </table:table-cell>
          <table:table-cell office:value-type="string" calcext:value-type="string">
            <text:p>第３弾ブースターパック</text:p>
          </table:table-cell>
          <table:table-cell table:formula="of:=VLOOKUP([.G245];[$収録番号.$A$1:$収録番号.$B$9];2;0)" office:value-type="float" office:value="35" calcext:value-type="float">
            <text:p>35</text:p>
          </table:table-cell>
          <table:table-cell office:value-type="string" calcext:value-type="string">
            <text:p>R</text:p>
          </table:table-cell>
          <table:table-cell table:formula="of:=VLOOKUP([.I245];[$レアリティ番号.$A$1:$レアリティ番号.$B$4];2;0)" office:value-type="float" office:value="2" calcext:value-type="float">
            <text:p>2</text:p>
          </table:table-cell>
          <table:table-cell office:value-type="string" calcext:value-type="string">
            <text:p>イジン</text:p>
          </table:table-cell>
          <table:table-cell table:formula="of:=VLOOKUP([.K245];[$種類番号.$A$1:$種類番号.$B$4];2;0)" office:value-type="float" office:value="1" calcext:value-type="float">
            <text:p>1</text:p>
          </table:table-cell>
          <table:table-cell office:value-type="string" calcext:value-type="string">
            <text:p>赤</text:p>
          </table:table-cell>
          <table:table-cell table:formula="of:=VLOOKUP([.M245];[$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4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45];[$特性番号.$A$1:$特性番号.$B$8];2;0);0)" office:value-type="float" office:value="0" calcext:value-type="float">
            <text:p>0</text:p>
          </table:table-cell>
          <table:table-cell office:value-type="string" calcext:value-type="string">
            <text:p>これが戦場にいる間、自分の戦場の『アタック+』能力を持つイジンは「即応」を得る。</text:p>
          </table:table-cell>
          <table:table-cell table:style-name="ce8" table:formula="of:=NA()" office:value-type="string" office:string-value="" calcext:value-type="error">
            <text:p>#N/A</text:p>
          </table:table-cell>
          <table:table-cell table:formula="of:=IFERROR(VLOOKUP([.$V245];[$遺業能力番号.$A$1:$遺業能力番号.$B$9];2;0);0)" office:value-type="float" office:value="0" calcext:value-type="float">
            <text:p>0</text:p>
          </table:table-cell>
          <table:table-cell office:value-type="string" calcext:value-type="string">
            <text:p>https://one-draw.jp/ijinden/cardlist/003/card/03_016.png</text:p>
          </table:table-cell>
          <table:table-cell table:formula="of:=CONCATENATE([$JSON.$A$1];[.$C245];[$JSON.$B$1];[.$E245];[$JSON.$C$1];[.$F245];[$JSON.$D$1];IF(ISNA([.$S245]);&quot;null&quot;;&quot;&quot;&quot;&quot;&amp;[.$S245]&amp;&quot;&quot;&quot;&quot;);[$JSON.$E$1];[.$U245];[$JSON.$F$1];IF(ISNA([.$V245]);&quot;null&quot;;&quot;&quot;&quot;&quot;&amp;[.$V245]&amp;&quot;&quot;&quot;&quot;);[$JSON.$G$1];[.$X245];[$JSON.$H$1];[.$H245];[$JSON.$I$1];[.J245];[$JSON.$J$1];[.$L245];[$JSON.$K$1];[.$O245];[$JSON.$L$1];[.$N245];[$JSON.$M$1];[.$R245];[$JSON.$N$1];[.$T245];[$JSON.$O$1];[.$W245];[$JSON.$P$1];[.$A245];[$JSON.$Q$1];[.$B245];[$JSON.$R$1])" office:value-type="string" office:string-value="{&quot;id&quot;:&quot;3-16&quot;,&quot;name&quot;:&quot;ジョージ・ワシントン&quot;,&quot;kana&quot;:&quot;じょーじわしんとん&quot;,&quot;traitText&quot;:null,&quot;ruleText&quot;:&quot;これが戦場にいる間、自分の戦場の『アタック+』能力を持つイジンは「即応」を得る。&quot;,&quot;legacyText&quot;:null,&quot;imageUrl&quot;:&quot;https://one-draw.jp/ijinden/cardlist/003/card/03_016.png&quot;,&quot;expansion&quot;:35,&quot;rarity&quot;:2,&quot;type&quot;:1,&quot;level&quot;:1,&quot;color&quot;:1,&quot;term&quot;:0,&quot;trait&quot;:0,&quot;legacy&quot;:0,&quot;orderTable&quot;:244,&quot;orderDeck&quot;:5}," calcext:value-type="string">
            <text:p>{"id":"3-16","name":"ジョージ・ワシントン","kana":"じょーじわしんとん","traitText":null,"ruleText":"これが戦場にいる間、自分の戦場の『アタック+』能力を持つイジンは「即応」を得る。","legacyText":null,"imageUrl":"https://one-draw.jp/ijinden/cardlist/003/card/03_016.png","expansion":35,"rarity":2,"type":1,"level":1,"color":1,"term":0,"trait":0,"legacy":0,"orderTable":244,"orderDeck":5},</text:p>
          </table:table-cell>
          <table:table-cell table:number-columns-repeated="16347"/>
        </table:table-row>
        <table:table-row table:style-name="ro2">
          <table:table-cell office:value-type="float" office:value="245" calcext:value-type="float">
            <text:p>245</text:p>
          </table:table-cell>
          <table:table-cell office:value-type="float" office:value="219" calcext:value-type="float">
            <text:p>219</text:p>
          </table:table-cell>
          <table:table-cell office:value-type="string" calcext:value-type="string">
            <text:p>3-17</text:p>
          </table:table-cell>
          <table:table-cell office:value-type="float" office:value="17" calcext:value-type="float">
            <text:p>17</text:p>
          </table:table-cell>
          <table:table-cell office:value-type="string" calcext:value-type="string">
            <text:p>大塩平八郎</text:p>
          </table:table-cell>
          <table:table-cell office:value-type="string" calcext:value-type="string">
            <text:p>おおしおへいはちろう</text:p>
          </table:table-cell>
          <table:table-cell office:value-type="string" calcext:value-type="string">
            <text:p>第３弾ブースターパック</text:p>
          </table:table-cell>
          <table:table-cell table:formula="of:=VLOOKUP([.G246];[$収録番号.$A$1:$収録番号.$B$9];2;0)" office:value-type="float" office:value="35" calcext:value-type="float">
            <text:p>35</text:p>
          </table:table-cell>
          <table:table-cell office:value-type="string" calcext:value-type="string">
            <text:p>N</text:p>
          </table:table-cell>
          <table:table-cell table:formula="of:=VLOOKUP([.I246];[$レアリティ番号.$A$1:$レアリティ番号.$B$4];2;0)" office:value-type="float" office:value="1" calcext:value-type="float">
            <text:p>1</text:p>
          </table:table-cell>
          <table:table-cell office:value-type="string" calcext:value-type="string">
            <text:p>イジン</text:p>
          </table:table-cell>
          <table:table-cell table:formula="of:=VLOOKUP([.K246];[$種類番号.$A$1:$種類番号.$B$4];2;0)" office:value-type="float" office:value="1" calcext:value-type="float">
            <text:p>1</text:p>
          </table:table-cell>
          <table:table-cell office:value-type="string" calcext:value-type="string">
            <text:p>赤</text:p>
          </table:table-cell>
          <table:table-cell table:formula="of:=VLOOKUP([.M246];[$色番号.$A$1:$色番号.$B$10];2;0)" office:value-type="float" office:value="1" calcext:value-type="float">
            <text:p>1</text:p>
          </table:table-cell>
          <table:table-cell office:value-type="float" office:value="8" calcext:value-type="float">
            <text:p>8</text:p>
          </table:table-cell>
          <table:table-cell table:formula="of:=NA()" office:value-type="string" office:string-value="" calcext:value-type="error">
            <text:p>#N/A</text:p>
          </table:table-cell>
          <table:table-cell office:value-type="string" calcext:value-type="string">
            <text:p>決起</text:p>
          </table:table-cell>
          <table:table-cell table:formula="of:=IFERROR(VLOOKUP([.$Q246];[$能力語番号.$A$1:$能力語番号.$B$10];2;0);0)" office:value-type="float" office:value="4" calcext:value-type="float">
            <text:p>4</text:p>
          </table:table-cell>
          <table:table-cell table:formula="of:=NA()" office:value-type="string" office:string-value="" calcext:value-type="error">
            <text:p>#N/A</text:p>
          </table:table-cell>
          <table:table-cell table:formula="of:=IFERROR(VLOOKUP([.$S246];[$特性番号.$A$1:$特性番号.$B$8];2;0);0)" office:value-type="float" office:value="0" calcext:value-type="float">
            <text:p>0</text:p>
          </table:table-cell>
          <table:table-cell office:value-type="string" calcext:value-type="string">
            <text:p>これのイジン召喚に際し、これのレベルは、相手の戦場のイジンとハイケイを合わせた数と同じだけ下がる。¶決起 - マリョク配置によってカードが自分の魔力ゾーンに置かれたとき、自分の魔力ゾーンのマリョクが4つ以上なら発動できる。自分のガーディアン1つを山札の上に戻して、戦場のハイケイすべてを破壊する。</text:p>
          </table:table-cell>
          <table:table-cell table:style-name="ce8" office:value-type="string" calcext:value-type="string">
            <text:p>1ドローする</text:p>
          </table:table-cell>
          <table:table-cell table:formula="of:=IFERROR(VLOOKUP([.$V246];[$遺業能力番号.$A$1:$遺業能力番号.$B$9];2;0);0)" office:value-type="float" office:value="4" calcext:value-type="float">
            <text:p>4</text:p>
          </table:table-cell>
          <table:table-cell office:value-type="string" calcext:value-type="string">
            <text:p>https://one-draw.jp/ijinden/cardlist/003/card/03_017.png</text:p>
          </table:table-cell>
          <table:table-cell table:formula="of:=CONCATENATE([$JSON.$A$1];[.$C246];[$JSON.$B$1];[.$E246];[$JSON.$C$1];[.$F246];[$JSON.$D$1];IF(ISNA([.$S246]);&quot;null&quot;;&quot;&quot;&quot;&quot;&amp;[.$S246]&amp;&quot;&quot;&quot;&quot;);[$JSON.$E$1];[.$U246];[$JSON.$F$1];IF(ISNA([.$V246]);&quot;null&quot;;&quot;&quot;&quot;&quot;&amp;[.$V246]&amp;&quot;&quot;&quot;&quot;);[$JSON.$G$1];[.$X246];[$JSON.$H$1];[.$H246];[$JSON.$I$1];[.J246];[$JSON.$J$1];[.$L246];[$JSON.$K$1];[.$O246];[$JSON.$L$1];[.$N246];[$JSON.$M$1];[.$R246];[$JSON.$N$1];[.$T246];[$JSON.$O$1];[.$W246];[$JSON.$P$1];[.$A246];[$JSON.$Q$1];[.$B246];[$JSON.$R$1])" office:value-type="string" office:string-value="{&quot;id&quot;:&quot;3-17&quot;,&quot;name&quot;:&quot;大塩平八郎&quot;,&quot;kana&quot;:&quot;おおしおへいはちろう&quot;,&quot;traitText&quot;:null,&quot;ruleText&quot;:&quot;これのイジン召喚に際し、これのレベルは、相手の戦場のイジンとハイケイを合わせた数と同じだけ下がる。¶決起 - マリョク配置によってカードが自分の魔力ゾーンに置かれたとき、自分の魔力ゾーンのマリョクが4つ以上なら発動できる。自分のガーディアン1つを山札の上に戻して、戦場のハイケイすべてを破壊する。&quot;,&quot;legacyText&quot;:&quot;1ドローする&quot;,&quot;imageUrl&quot;:&quot;https://one-draw.jp/ijinden/cardlist/003/card/03_017.png&quot;,&quot;expansion&quot;:35,&quot;rarity&quot;:1,&quot;type&quot;:1,&quot;level&quot;:8,&quot;color&quot;:1,&quot;term&quot;:4,&quot;trait&quot;:0,&quot;legacy&quot;:4,&quot;orderTable&quot;:245,&quot;orderDeck&quot;:219}," calcext:value-type="string">
            <text:p>{"id":"3-17","name":"大塩平八郎","kana":"おおしおへいはちろう","traitText":null,"ruleText":"これのイジン召喚に際し、これのレベルは、相手の戦場のイジンとハイケイを合わせた数と同じだけ下がる。¶決起 - マリョク配置によってカードが自分の魔力ゾーンに置かれたとき、自分の魔力ゾーンのマリョクが4つ以上なら発動できる。自分のガーディアン1つを山札の上に戻して、戦場のハイケイすべてを破壊する。","legacyText":"1ドローする","imageUrl":"https://one-draw.jp/ijinden/cardlist/003/card/03_017.png","expansion":35,"rarity":1,"type":1,"level":8,"color":1,"term":4,"trait":0,"legacy":4,"orderTable":245,"orderDeck":219},</text:p>
          </table:table-cell>
          <table:table-cell table:number-columns-repeated="16347"/>
        </table:table-row>
        <table:table-row table:style-name="ro2">
          <table:table-cell office:value-type="float" office:value="246" calcext:value-type="float">
            <text:p>246</text:p>
          </table:table-cell>
          <table:table-cell office:value-type="float" office:value="183" calcext:value-type="float">
            <text:p>183</text:p>
          </table:table-cell>
          <table:table-cell office:value-type="string" calcext:value-type="string">
            <text:p>3-18</text:p>
          </table:table-cell>
          <table:table-cell office:value-type="float" office:value="18" calcext:value-type="float">
            <text:p>18</text:p>
          </table:table-cell>
          <table:table-cell office:value-type="string" calcext:value-type="string">
            <text:p>水野忠邦</text:p>
          </table:table-cell>
          <table:table-cell office:value-type="string" calcext:value-type="string">
            <text:p>みずのただくに</text:p>
          </table:table-cell>
          <table:table-cell office:value-type="string" calcext:value-type="string">
            <text:p>第３弾ブースターパック</text:p>
          </table:table-cell>
          <table:table-cell table:formula="of:=VLOOKUP([.G247];[$収録番号.$A$1:$収録番号.$B$9];2;0)" office:value-type="float" office:value="35" calcext:value-type="float">
            <text:p>35</text:p>
          </table:table-cell>
          <table:table-cell office:value-type="string" calcext:value-type="string">
            <text:p>N</text:p>
          </table:table-cell>
          <table:table-cell table:formula="of:=VLOOKUP([.I247];[$レアリティ番号.$A$1:$レアリティ番号.$B$4];2;0)" office:value-type="float" office:value="1" calcext:value-type="float">
            <text:p>1</text:p>
          </table:table-cell>
          <table:table-cell office:value-type="string" calcext:value-type="string">
            <text:p>イジン</text:p>
          </table:table-cell>
          <table:table-cell table:formula="of:=VLOOKUP([.K247];[$種類番号.$A$1:$種類番号.$B$4];2;0)" office:value-type="float" office:value="1" calcext:value-type="float">
            <text:p>1</text:p>
          </table:table-cell>
          <table:table-cell office:value-type="string" calcext:value-type="string">
            <text:p>赤</text:p>
          </table:table-cell>
          <table:table-cell table:formula="of:=VLOOKUP([.M247];[$色番号.$A$1:$色番号.$B$10];2;0)" office:value-type="float" office:value="1" calcext:value-type="float">
            <text:p>1</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4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47];[$特性番号.$A$1:$特性番号.$B$8];2;0);0)" office:value-type="float" office:value="0" calcext:value-type="float">
            <text:p>0</text:p>
          </table:table-cell>
          <table:table-cell office:value-type="string" calcext:value-type="string">
            <text:p>これのイジン召喚に際し、これのレベルは、相手の魔力ゾーンのマリョク1つにつき1だけ下がる。¶これが戦場にいる間、マリョク配置権は、戦場の能力によって増えない。</text:p>
          </table:table-cell>
          <table:table-cell table:style-name="ce8" table:formula="of:=NA()" office:value-type="string" office:string-value="" calcext:value-type="error">
            <text:p>#N/A</text:p>
          </table:table-cell>
          <table:table-cell table:formula="of:=IFERROR(VLOOKUP([.$V247];[$遺業能力番号.$A$1:$遺業能力番号.$B$9];2;0);0)" office:value-type="float" office:value="0" calcext:value-type="float">
            <text:p>0</text:p>
          </table:table-cell>
          <table:table-cell office:value-type="string" calcext:value-type="string">
            <text:p>https://one-draw.jp/ijinden/cardlist/003/card/03_018.png</text:p>
          </table:table-cell>
          <table:table-cell table:formula="of:=CONCATENATE([$JSON.$A$1];[.$C247];[$JSON.$B$1];[.$E247];[$JSON.$C$1];[.$F247];[$JSON.$D$1];IF(ISNA([.$S247]);&quot;null&quot;;&quot;&quot;&quot;&quot;&amp;[.$S247]&amp;&quot;&quot;&quot;&quot;);[$JSON.$E$1];[.$U247];[$JSON.$F$1];IF(ISNA([.$V247]);&quot;null&quot;;&quot;&quot;&quot;&quot;&amp;[.$V247]&amp;&quot;&quot;&quot;&quot;);[$JSON.$G$1];[.$X247];[$JSON.$H$1];[.$H247];[$JSON.$I$1];[.J247];[$JSON.$J$1];[.$L247];[$JSON.$K$1];[.$O247];[$JSON.$L$1];[.$N247];[$JSON.$M$1];[.$R247];[$JSON.$N$1];[.$T247];[$JSON.$O$1];[.$W247];[$JSON.$P$1];[.$A247];[$JSON.$Q$1];[.$B247];[$JSON.$R$1])" office:value-type="string" office:string-value="{&quot;id&quot;:&quot;3-18&quot;,&quot;name&quot;:&quot;水野忠邦&quot;,&quot;kana&quot;:&quot;みずのただくに&quot;,&quot;traitText&quot;:null,&quot;ruleText&quot;:&quot;これのイジン召喚に際し、これのレベルは、相手の魔力ゾーンのマリョク1つにつき1だけ下がる。¶これが戦場にいる間、マリョク配置権は、戦場の能力によって増えない。&quot;,&quot;legacyText&quot;:null,&quot;imageUrl&quot;:&quot;https://one-draw.jp/ijinden/cardlist/003/card/03_018.png&quot;,&quot;expansion&quot;:35,&quot;rarity&quot;:1,&quot;type&quot;:1,&quot;level&quot;:6,&quot;color&quot;:1,&quot;term&quot;:0,&quot;trait&quot;:0,&quot;legacy&quot;:0,&quot;orderTable&quot;:246,&quot;orderDeck&quot;:183}," calcext:value-type="string">
            <text:p>{"id":"3-18","name":"水野忠邦","kana":"みずのただくに","traitText":null,"ruleText":"これのイジン召喚に際し、これのレベルは、相手の魔力ゾーンのマリョク1つにつき1だけ下がる。¶これが戦場にいる間、マリョク配置権は、戦場の能力によって増えない。","legacyText":null,"imageUrl":"https://one-draw.jp/ijinden/cardlist/003/card/03_018.png","expansion":35,"rarity":1,"type":1,"level":6,"color":1,"term":0,"trait":0,"legacy":0,"orderTable":246,"orderDeck":183},</text:p>
          </table:table-cell>
          <table:table-cell table:number-columns-repeated="16347"/>
        </table:table-row>
        <table:table-row table:style-name="ro2">
          <table:table-cell office:value-type="float" office:value="247" calcext:value-type="float">
            <text:p>247</text:p>
          </table:table-cell>
          <table:table-cell office:value-type="float" office:value="220" calcext:value-type="float">
            <text:p>220</text:p>
          </table:table-cell>
          <table:table-cell office:value-type="string" calcext:value-type="string">
            <text:p>3-19</text:p>
          </table:table-cell>
          <table:table-cell office:value-type="float" office:value="19" calcext:value-type="float">
            <text:p>19</text:p>
          </table:table-cell>
          <table:table-cell office:value-type="string" calcext:value-type="string">
            <text:p>伊達政宗</text:p>
          </table:table-cell>
          <table:table-cell office:value-type="string" calcext:value-type="string">
            <text:p>だてまさむね</text:p>
          </table:table-cell>
          <table:table-cell office:value-type="string" calcext:value-type="string">
            <text:p>第３弾ブースターパック</text:p>
          </table:table-cell>
          <table:table-cell table:formula="of:=VLOOKUP([.G248];[$収録番号.$A$1:$収録番号.$B$9];2;0)" office:value-type="float" office:value="35" calcext:value-type="float">
            <text:p>35</text:p>
          </table:table-cell>
          <table:table-cell office:value-type="string" calcext:value-type="string">
            <text:p>R</text:p>
          </table:table-cell>
          <table:table-cell table:formula="of:=VLOOKUP([.I248];[$レアリティ番号.$A$1:$レアリティ番号.$B$4];2;0)" office:value-type="float" office:value="2" calcext:value-type="float">
            <text:p>2</text:p>
          </table:table-cell>
          <table:table-cell office:value-type="string" calcext:value-type="string">
            <text:p>イジン</text:p>
          </table:table-cell>
          <table:table-cell table:formula="of:=VLOOKUP([.K248];[$種類番号.$A$1:$種類番号.$B$4];2;0)" office:value-type="float" office:value="1" calcext:value-type="float">
            <text:p>1</text:p>
          </table:table-cell>
          <table:table-cell office:value-type="string" calcext:value-type="string">
            <text:p>青</text:p>
          </table:table-cell>
          <table:table-cell table:formula="of:=VLOOKUP([.M248];[$色番号.$A$1:$色番号.$B$10];2;0)" office:value-type="float" office:value="2" calcext:value-type="float">
            <text:p>2</text:p>
          </table:table-cell>
          <table:table-cell office:value-type="float" office:value="8" calcext:value-type="float">
            <text:p>8</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48];[$能力語番号.$A$1:$能力語番号.$B$10];2;0);0)" office:value-type="float" office:value="0" calcext:value-type="float">
            <text:p>0</text:p>
          </table:table-cell>
          <table:table-cell office:value-type="string" calcext:value-type="string">
            <text:p>剣術</text:p>
          </table:table-cell>
          <table:table-cell table:formula="of:=IFERROR(VLOOKUP([.$S248];[$特性番号.$A$1:$特性番号.$B$8];2;0);0)" office:value-type="float" office:value="1" calcext:value-type="float">
            <text:p>1</text:p>
          </table:table-cell>
          <table:table-cell office:value-type="string" calcext:value-type="string">
            <text:p>装備していない間、ブロッカーになれない。¶戦場の「剣術」イジン1体につき「ブロック+1000」を得る。</text:p>
          </table:table-cell>
          <table:table-cell table:style-name="ce8" office:value-type="string" calcext:value-type="string">
            <text:p>反魂</text:p>
          </table:table-cell>
          <table:table-cell table:formula="of:=IFERROR(VLOOKUP([.$V248];[$遺業能力番号.$A$1:$遺業能力番号.$B$9];2;0);0)" office:value-type="float" office:value="6" calcext:value-type="float">
            <text:p>6</text:p>
          </table:table-cell>
          <table:table-cell office:value-type="string" calcext:value-type="string">
            <text:p>https://one-draw.jp/ijinden/cardlist/003/card/03_019.png</text:p>
          </table:table-cell>
          <table:table-cell table:formula="of:=CONCATENATE([$JSON.$A$1];[.$C248];[$JSON.$B$1];[.$E248];[$JSON.$C$1];[.$F248];[$JSON.$D$1];IF(ISNA([.$S248]);&quot;null&quot;;&quot;&quot;&quot;&quot;&amp;[.$S248]&amp;&quot;&quot;&quot;&quot;);[$JSON.$E$1];[.$U248];[$JSON.$F$1];IF(ISNA([.$V248]);&quot;null&quot;;&quot;&quot;&quot;&quot;&amp;[.$V248]&amp;&quot;&quot;&quot;&quot;);[$JSON.$G$1];[.$X248];[$JSON.$H$1];[.$H248];[$JSON.$I$1];[.J248];[$JSON.$J$1];[.$L248];[$JSON.$K$1];[.$O248];[$JSON.$L$1];[.$N248];[$JSON.$M$1];[.$R248];[$JSON.$N$1];[.$T248];[$JSON.$O$1];[.$W248];[$JSON.$P$1];[.$A248];[$JSON.$Q$1];[.$B248];[$JSON.$R$1])" office:value-type="string" office:string-value="{&quot;id&quot;:&quot;3-19&quot;,&quot;name&quot;:&quot;伊達政宗&quot;,&quot;kana&quot;:&quot;だてまさむね&quot;,&quot;traitText&quot;:&quot;剣術&quot;,&quot;ruleText&quot;:&quot;装備していない間、ブロッカーになれない。¶戦場の「剣術」イジン1体につき「ブロック+1000」を得る。&quot;,&quot;legacyText&quot;:&quot;反魂&quot;,&quot;imageUrl&quot;:&quot;https://one-draw.jp/ijinden/cardlist/003/card/03_019.png&quot;,&quot;expansion&quot;:35,&quot;rarity&quot;:2,&quot;type&quot;:1,&quot;level&quot;:8,&quot;color&quot;:2,&quot;term&quot;:0,&quot;trait&quot;:1,&quot;legacy&quot;:6,&quot;orderTable&quot;:247,&quot;orderDeck&quot;:220}," calcext:value-type="string">
            <text:p>{"id":"3-19","name":"伊達政宗","kana":"だてまさむね","traitText":"剣術","ruleText":"装備していない間、ブロッカーになれない。¶戦場の「剣術」イジン1体につき「ブロック+1000」を得る。","legacyText":"反魂","imageUrl":"https://one-draw.jp/ijinden/cardlist/003/card/03_019.png","expansion":35,"rarity":2,"type":1,"level":8,"color":2,"term":0,"trait":1,"legacy":6,"orderTable":247,"orderDeck":220},</text:p>
          </table:table-cell>
          <table:table-cell table:number-columns-repeated="16347"/>
        </table:table-row>
        <table:table-row table:style-name="ro2">
          <table:table-cell office:value-type="float" office:value="248" calcext:value-type="float">
            <text:p>248</text:p>
          </table:table-cell>
          <table:table-cell office:value-type="float" office:value="189" calcext:value-type="float">
            <text:p>189</text:p>
          </table:table-cell>
          <table:table-cell office:value-type="string" calcext:value-type="string">
            <text:p>3-20</text:p>
          </table:table-cell>
          <table:table-cell office:value-type="float" office:value="20" calcext:value-type="float">
            <text:p>20</text:p>
          </table:table-cell>
          <table:table-cell office:value-type="string" calcext:value-type="string">
            <text:p>バルトロメウ=ディアス</text:p>
          </table:table-cell>
          <table:table-cell office:value-type="string" calcext:value-type="string">
            <text:p>ばるとろめうでぃあす</text:p>
          </table:table-cell>
          <table:table-cell office:value-type="string" calcext:value-type="string">
            <text:p>第３弾ブースターパック</text:p>
          </table:table-cell>
          <table:table-cell table:formula="of:=VLOOKUP([.G249];[$収録番号.$A$1:$収録番号.$B$9];2;0)" office:value-type="float" office:value="35" calcext:value-type="float">
            <text:p>35</text:p>
          </table:table-cell>
          <table:table-cell office:value-type="string" calcext:value-type="string">
            <text:p>N</text:p>
          </table:table-cell>
          <table:table-cell table:formula="of:=VLOOKUP([.I249];[$レアリティ番号.$A$1:$レアリティ番号.$B$4];2;0)" office:value-type="float" office:value="1" calcext:value-type="float">
            <text:p>1</text:p>
          </table:table-cell>
          <table:table-cell office:value-type="string" calcext:value-type="string">
            <text:p>イジン</text:p>
          </table:table-cell>
          <table:table-cell table:formula="of:=VLOOKUP([.K249];[$種類番号.$A$1:$種類番号.$B$4];2;0)" office:value-type="float" office:value="1" calcext:value-type="float">
            <text:p>1</text:p>
          </table:table-cell>
          <table:table-cell office:value-type="string" calcext:value-type="string">
            <text:p>青</text:p>
          </table:table-cell>
          <table:table-cell table:formula="of:=VLOOKUP([.M249];[$色番号.$A$1:$色番号.$B$10];2;0)" office:value-type="float" office:value="2" calcext:value-type="float">
            <text:p>2</text:p>
          </table:table-cell>
          <table:table-cell office:value-type="float" office:value="6" calcext:value-type="float">
            <text:p>6</text:p>
          </table:table-cell>
          <table:table-cell table:formula="of:=NA()" office:value-type="string" office:string-value="" calcext:value-type="error">
            <text:p>#N/A</text:p>
          </table:table-cell>
          <table:table-cell office:value-type="string" calcext:value-type="string">
            <text:p>航海</text:p>
          </table:table-cell>
          <table:table-cell table:formula="of:=IFERROR(VLOOKUP([.$Q249];[$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249];[$特性番号.$A$1:$特性番号.$B$8];2;0);0)" office:value-type="float" office:value="0" calcext:value-type="float">
            <text:p>0</text:p>
          </table:table-cell>
          <table:table-cell office:value-type="string" calcext:value-type="string">
            <text:p>航海 - アタッカーになったとき、戦場のイジン1体か、戦場のハイケイ1つを手札に戻す。</text:p>
          </table:table-cell>
          <table:table-cell table:style-name="ce8" table:formula="of:=NA()" office:value-type="string" office:string-value="" calcext:value-type="error">
            <text:p>#N/A</text:p>
          </table:table-cell>
          <table:table-cell table:formula="of:=IFERROR(VLOOKUP([.$V249];[$遺業能力番号.$A$1:$遺業能力番号.$B$9];2;0);0)" office:value-type="float" office:value="0" calcext:value-type="float">
            <text:p>0</text:p>
          </table:table-cell>
          <table:table-cell office:value-type="string" calcext:value-type="string">
            <text:p>https://one-draw.jp/ijinden/cardlist/003/card/03_020.png</text:p>
          </table:table-cell>
          <table:table-cell table:formula="of:=CONCATENATE([$JSON.$A$1];[.$C249];[$JSON.$B$1];[.$E249];[$JSON.$C$1];[.$F249];[$JSON.$D$1];IF(ISNA([.$S249]);&quot;null&quot;;&quot;&quot;&quot;&quot;&amp;[.$S249]&amp;&quot;&quot;&quot;&quot;);[$JSON.$E$1];[.$U249];[$JSON.$F$1];IF(ISNA([.$V249]);&quot;null&quot;;&quot;&quot;&quot;&quot;&amp;[.$V249]&amp;&quot;&quot;&quot;&quot;);[$JSON.$G$1];[.$X249];[$JSON.$H$1];[.$H249];[$JSON.$I$1];[.J249];[$JSON.$J$1];[.$L249];[$JSON.$K$1];[.$O249];[$JSON.$L$1];[.$N249];[$JSON.$M$1];[.$R249];[$JSON.$N$1];[.$T249];[$JSON.$O$1];[.$W249];[$JSON.$P$1];[.$A249];[$JSON.$Q$1];[.$B249];[$JSON.$R$1])" office:value-type="string" office:string-value="{&quot;id&quot;:&quot;3-20&quot;,&quot;name&quot;:&quot;バルトロメウ=ディアス&quot;,&quot;kana&quot;:&quot;ばるとろめうでぃあす&quot;,&quot;traitText&quot;:null,&quot;ruleText&quot;:&quot;航海 - アタッカーになったとき、戦場のイジン1体か、戦場のハイケイ1つを手札に戻す。&quot;,&quot;legacyText&quot;:null,&quot;imageUrl&quot;:&quot;https://one-draw.jp/ijinden/cardlist/003/card/03_020.png&quot;,&quot;expansion&quot;:35,&quot;rarity&quot;:1,&quot;type&quot;:1,&quot;level&quot;:6,&quot;color&quot;:2,&quot;term&quot;:1,&quot;trait&quot;:0,&quot;legacy&quot;:0,&quot;orderTable&quot;:248,&quot;orderDeck&quot;:189}," calcext:value-type="string">
            <text:p>{"id":"3-20","name":"バルトロメウ=ディアス","kana":"ばるとろめうでぃあす","traitText":null,"ruleText":"航海 - アタッカーになったとき、戦場のイジン1体か、戦場のハイケイ1つを手札に戻す。","legacyText":null,"imageUrl":"https://one-draw.jp/ijinden/cardlist/003/card/03_020.png","expansion":35,"rarity":1,"type":1,"level":6,"color":2,"term":1,"trait":0,"legacy":0,"orderTable":248,"orderDeck":189},</text:p>
          </table:table-cell>
          <table:table-cell table:number-columns-repeated="16347"/>
        </table:table-row>
        <table:table-row table:style-name="ro2">
          <table:table-cell office:value-type="float" office:value="249" calcext:value-type="float">
            <text:p>249</text:p>
          </table:table-cell>
          <table:table-cell office:value-type="float" office:value="9" calcext:value-type="float">
            <text:p>9</text:p>
          </table:table-cell>
          <table:table-cell office:value-type="string" calcext:value-type="string">
            <text:p>3-21</text:p>
          </table:table-cell>
          <table:table-cell office:value-type="float" office:value="21" calcext:value-type="float">
            <text:p>21</text:p>
          </table:table-cell>
          <table:table-cell office:value-type="string" calcext:value-type="string">
            <text:p>木戸孝允</text:p>
          </table:table-cell>
          <table:table-cell office:value-type="string" calcext:value-type="string">
            <text:p>きどたかよし</text:p>
          </table:table-cell>
          <table:table-cell office:value-type="string" calcext:value-type="string">
            <text:p>第３弾ブースターパック</text:p>
          </table:table-cell>
          <table:table-cell table:formula="of:=VLOOKUP([.G250];[$収録番号.$A$1:$収録番号.$B$9];2;0)" office:value-type="float" office:value="35" calcext:value-type="float">
            <text:p>35</text:p>
          </table:table-cell>
          <table:table-cell office:value-type="string" calcext:value-type="string">
            <text:p>N</text:p>
          </table:table-cell>
          <table:table-cell table:formula="of:=VLOOKUP([.I250];[$レアリティ番号.$A$1:$レアリティ番号.$B$4];2;0)" office:value-type="float" office:value="1" calcext:value-type="float">
            <text:p>1</text:p>
          </table:table-cell>
          <table:table-cell office:value-type="string" calcext:value-type="string">
            <text:p>イジン</text:p>
          </table:table-cell>
          <table:table-cell table:formula="of:=VLOOKUP([.K250];[$種類番号.$A$1:$種類番号.$B$4];2;0)" office:value-type="float" office:value="1" calcext:value-type="float">
            <text:p>1</text:p>
          </table:table-cell>
          <table:table-cell office:value-type="string" calcext:value-type="string">
            <text:p>青</text:p>
          </table:table-cell>
          <table:table-cell table:formula="of:=VLOOKUP([.M250];[$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50];[$能力語番号.$A$1:$能力語番号.$B$10];2;0);0)" office:value-type="float" office:value="0" calcext:value-type="float">
            <text:p>0</text:p>
          </table:table-cell>
          <table:table-cell office:value-type="string" calcext:value-type="string">
            <text:p>思想</text:p>
          </table:table-cell>
          <table:table-cell table:formula="of:=IFERROR(VLOOKUP([.$S250];[$特性番号.$A$1:$特性番号.$B$8];2;0);0)" office:value-type="float" office:value="8" calcext:value-type="float">
            <text:p>8</text:p>
          </table:table-cell>
          <table:table-cell office:value-type="string" calcext:value-type="string">
            <text:p>スタンド</text:p>
          </table:table-cell>
          <table:table-cell table:style-name="ce8" office:value-type="string" calcext:value-type="string">
            <text:p>1ドローする</text:p>
          </table:table-cell>
          <table:table-cell table:formula="of:=IFERROR(VLOOKUP([.$V250];[$遺業能力番号.$A$1:$遺業能力番号.$B$9];2;0);0)" office:value-type="float" office:value="4" calcext:value-type="float">
            <text:p>4</text:p>
          </table:table-cell>
          <table:table-cell office:value-type="string" calcext:value-type="string">
            <text:p>https://one-draw.jp/ijinden/cardlist/003/card/03_021.png</text:p>
          </table:table-cell>
          <table:table-cell table:formula="of:=CONCATENATE([$JSON.$A$1];[.$C250];[$JSON.$B$1];[.$E250];[$JSON.$C$1];[.$F250];[$JSON.$D$1];IF(ISNA([.$S250]);&quot;null&quot;;&quot;&quot;&quot;&quot;&amp;[.$S250]&amp;&quot;&quot;&quot;&quot;);[$JSON.$E$1];[.$U250];[$JSON.$F$1];IF(ISNA([.$V250]);&quot;null&quot;;&quot;&quot;&quot;&quot;&amp;[.$V250]&amp;&quot;&quot;&quot;&quot;);[$JSON.$G$1];[.$X250];[$JSON.$H$1];[.$H250];[$JSON.$I$1];[.J250];[$JSON.$J$1];[.$L250];[$JSON.$K$1];[.$O250];[$JSON.$L$1];[.$N250];[$JSON.$M$1];[.$R250];[$JSON.$N$1];[.$T250];[$JSON.$O$1];[.$W250];[$JSON.$P$1];[.$A250];[$JSON.$Q$1];[.$B250];[$JSON.$R$1])" office:value-type="string" office:string-value="{&quot;id&quot;:&quot;3-21&quot;,&quot;name&quot;:&quot;木戸孝允&quot;,&quot;kana&quot;:&quot;きどたかよし&quot;,&quot;traitText&quot;:&quot;思想&quot;,&quot;ruleText&quot;:&quot;スタンド&quot;,&quot;legacyText&quot;:&quot;1ドローする&quot;,&quot;imageUrl&quot;:&quot;https://one-draw.jp/ijinden/cardlist/003/card/03_021.png&quot;,&quot;expansion&quot;:35,&quot;rarity&quot;:1,&quot;type&quot;:1,&quot;level&quot;:1,&quot;color&quot;:2,&quot;term&quot;:0,&quot;trait&quot;:8,&quot;legacy&quot;:4,&quot;orderTable&quot;:249,&quot;orderDeck&quot;:9}," calcext:value-type="string">
            <text:p>{"id":"3-21","name":"木戸孝允","kana":"きどたかよし","traitText":"思想","ruleText":"スタンド","legacyText":"1ドローする","imageUrl":"https://one-draw.jp/ijinden/cardlist/003/card/03_021.png","expansion":35,"rarity":1,"type":1,"level":1,"color":2,"term":0,"trait":8,"legacy":4,"orderTable":249,"orderDeck":9},</text:p>
          </table:table-cell>
          <table:table-cell table:number-columns-repeated="16347"/>
        </table:table-row>
        <table:table-row table:style-name="ro2">
          <table:table-cell office:value-type="float" office:value="250" calcext:value-type="float">
            <text:p>250</text:p>
          </table:table-cell>
          <table:table-cell office:value-type="float" office:value="40" calcext:value-type="float">
            <text:p>40</text:p>
          </table:table-cell>
          <table:table-cell office:value-type="string" calcext:value-type="string">
            <text:p>3-22</text:p>
          </table:table-cell>
          <table:table-cell office:value-type="float" office:value="22" calcext:value-type="float">
            <text:p>22</text:p>
          </table:table-cell>
          <table:table-cell office:value-type="string" calcext:value-type="string">
            <text:p>高杉晋作</text:p>
          </table:table-cell>
          <table:table-cell office:value-type="string" calcext:value-type="string">
            <text:p>たかすぎしんさく</text:p>
          </table:table-cell>
          <table:table-cell office:value-type="string" calcext:value-type="string">
            <text:p>第３弾ブースターパック</text:p>
          </table:table-cell>
          <table:table-cell table:formula="of:=VLOOKUP([.G251];[$収録番号.$A$1:$収録番号.$B$9];2;0)" office:value-type="float" office:value="35" calcext:value-type="float">
            <text:p>35</text:p>
          </table:table-cell>
          <table:table-cell office:value-type="string" calcext:value-type="string">
            <text:p>R</text:p>
          </table:table-cell>
          <table:table-cell table:formula="of:=VLOOKUP([.I251];[$レアリティ番号.$A$1:$レアリティ番号.$B$4];2;0)" office:value-type="float" office:value="2" calcext:value-type="float">
            <text:p>2</text:p>
          </table:table-cell>
          <table:table-cell office:value-type="string" calcext:value-type="string">
            <text:p>イジン</text:p>
          </table:table-cell>
          <table:table-cell table:formula="of:=VLOOKUP([.K251];[$種類番号.$A$1:$種類番号.$B$4];2;0)" office:value-type="float" office:value="1" calcext:value-type="float">
            <text:p>1</text:p>
          </table:table-cell>
          <table:table-cell office:value-type="string" calcext:value-type="string">
            <text:p>青</text:p>
          </table:table-cell>
          <table:table-cell table:formula="of:=VLOOKUP([.M251];[$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徴募</text:p>
          </table:table-cell>
          <table:table-cell table:formula="of:=IFERROR(VLOOKUP([.$Q251];[$能力語番号.$A$1:$能力語番号.$B$10];2;0);0)" office:value-type="float" office:value="8" calcext:value-type="float">
            <text:p>8</text:p>
          </table:table-cell>
          <table:table-cell office:value-type="string" calcext:value-type="string">
            <text:p>思想</text:p>
          </table:table-cell>
          <table:table-cell table:formula="of:=IFERROR(VLOOKUP([.$S251];[$特性番号.$A$1:$特性番号.$B$8];2;0);0)" office:value-type="float" office:value="8" calcext:value-type="float">
            <text:p>8</text:p>
          </table:table-cell>
          <table:table-cell office:value-type="string" calcext:value-type="string">
            <text:p>徴募 - この能力は戦場か墓地で発動する。自分のエンドフェイズが開始したとき、このターンにアタッカーが破壊されているなら、自分の手札のパワー2000以下のイジン1体を指定して発動できる。そのイジンを戦場に置いて、1ドローする。</text:p>
          </table:table-cell>
          <table:table-cell table:style-name="ce8" table:formula="of:=NA()" office:value-type="string" office:string-value="" calcext:value-type="error">
            <text:p>#N/A</text:p>
          </table:table-cell>
          <table:table-cell table:formula="of:=IFERROR(VLOOKUP([.$V251];[$遺業能力番号.$A$1:$遺業能力番号.$B$9];2;0);0)" office:value-type="float" office:value="0" calcext:value-type="float">
            <text:p>0</text:p>
          </table:table-cell>
          <table:table-cell office:value-type="string" calcext:value-type="string">
            <text:p>https://one-draw.jp/ijinden/cardlist/003/card/03_022.png</text:p>
          </table:table-cell>
          <table:table-cell table:formula="of:=CONCATENATE([$JSON.$A$1];[.$C251];[$JSON.$B$1];[.$E251];[$JSON.$C$1];[.$F251];[$JSON.$D$1];IF(ISNA([.$S251]);&quot;null&quot;;&quot;&quot;&quot;&quot;&amp;[.$S251]&amp;&quot;&quot;&quot;&quot;);[$JSON.$E$1];[.$U251];[$JSON.$F$1];IF(ISNA([.$V251]);&quot;null&quot;;&quot;&quot;&quot;&quot;&amp;[.$V251]&amp;&quot;&quot;&quot;&quot;);[$JSON.$G$1];[.$X251];[$JSON.$H$1];[.$H251];[$JSON.$I$1];[.J251];[$JSON.$J$1];[.$L251];[$JSON.$K$1];[.$O251];[$JSON.$L$1];[.$N251];[$JSON.$M$1];[.$R251];[$JSON.$N$1];[.$T251];[$JSON.$O$1];[.$W251];[$JSON.$P$1];[.$A251];[$JSON.$Q$1];[.$B251];[$JSON.$R$1])" office:value-type="string" office:string-value="{&quot;id&quot;:&quot;3-22&quot;,&quot;name&quot;:&quot;高杉晋作&quot;,&quot;kana&quot;:&quot;たかすぎしんさく&quot;,&quot;traitText&quot;:&quot;思想&quot;,&quot;ruleText&quot;:&quot;徴募 - この能力は戦場か墓地で発動する。自分のエンドフェイズが開始したとき、このターンにアタッカーが破壊されているなら、自分の手札のパワー2000以下のイジン1体を指定して発動できる。そのイジンを戦場に置いて、1ドローする。&quot;,&quot;legacyText&quot;:null,&quot;imageUrl&quot;:&quot;https://one-draw.jp/ijinden/cardlist/003/card/03_022.png&quot;,&quot;expansion&quot;:35,&quot;rarity&quot;:2,&quot;type&quot;:1,&quot;level&quot;:2,&quot;color&quot;:2,&quot;term&quot;:8,&quot;trait&quot;:8,&quot;legacy&quot;:0,&quot;orderTable&quot;:250,&quot;orderDeck&quot;:40}," calcext:value-type="string">
            <text:p>{"id":"3-22","name":"高杉晋作","kana":"たかすぎしんさく","traitText":"思想","ruleText":"徴募 - この能力は戦場か墓地で発動する。自分のエンドフェイズが開始したとき、このターンにアタッカーが破壊されているなら、自分の手札のパワー2000以下のイジン1体を指定して発動できる。そのイジンを戦場に置いて、1ドローする。","legacyText":null,"imageUrl":"https://one-draw.jp/ijinden/cardlist/003/card/03_022.png","expansion":35,"rarity":2,"type":1,"level":2,"color":2,"term":8,"trait":8,"legacy":0,"orderTable":250,"orderDeck":40},</text:p>
          </table:table-cell>
          <table:table-cell table:number-columns-repeated="16347"/>
        </table:table-row>
        <table:table-row table:style-name="ro2">
          <table:table-cell office:value-type="float" office:value="251" calcext:value-type="float">
            <text:p>251</text:p>
          </table:table-cell>
          <table:table-cell office:value-type="float" office:value="121" calcext:value-type="float">
            <text:p>121</text:p>
          </table:table-cell>
          <table:table-cell office:value-type="string" calcext:value-type="string">
            <text:p>3-23</text:p>
          </table:table-cell>
          <table:table-cell office:value-type="float" office:value="23" calcext:value-type="float">
            <text:p>23</text:p>
          </table:table-cell>
          <table:table-cell office:value-type="string" calcext:value-type="string">
            <text:p>トマス・ニューコメン</text:p>
          </table:table-cell>
          <table:table-cell office:value-type="string" calcext:value-type="string">
            <text:p>とますにゅーこめん</text:p>
          </table:table-cell>
          <table:table-cell office:value-type="string" calcext:value-type="string">
            <text:p>第３弾ブースターパック</text:p>
          </table:table-cell>
          <table:table-cell table:formula="of:=VLOOKUP([.G252];[$収録番号.$A$1:$収録番号.$B$9];2;0)" office:value-type="float" office:value="35" calcext:value-type="float">
            <text:p>35</text:p>
          </table:table-cell>
          <table:table-cell office:value-type="string" calcext:value-type="string">
            <text:p>N</text:p>
          </table:table-cell>
          <table:table-cell table:formula="of:=VLOOKUP([.I252];[$レアリティ番号.$A$1:$レアリティ番号.$B$4];2;0)" office:value-type="float" office:value="1" calcext:value-type="float">
            <text:p>1</text:p>
          </table:table-cell>
          <table:table-cell office:value-type="string" calcext:value-type="string">
            <text:p>イジン</text:p>
          </table:table-cell>
          <table:table-cell table:formula="of:=VLOOKUP([.K252];[$種類番号.$A$1:$種類番号.$B$4];2;0)" office:value-type="float" office:value="1" calcext:value-type="float">
            <text:p>1</text:p>
          </table:table-cell>
          <table:table-cell office:value-type="string" calcext:value-type="string">
            <text:p>青</text:p>
          </table:table-cell>
          <table:table-cell table:formula="of:=VLOOKUP([.M252];[$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5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52];[$特性番号.$A$1:$特性番号.$B$8];2;0);0)" office:value-type="float" office:value="0" calcext:value-type="float">
            <text:p>0</text:p>
          </table:table-cell>
          <table:table-cell office:value-type="string" calcext:value-type="string">
            <text:p>これが戦場にいる間、自分の戦場の装備しているイジンは「破壊されたとき、自分の魔力ゾーンのマリョク1つを手札に戻して発動できる。これを破壊されていない状態にする」を得る。</text:p>
          </table:table-cell>
          <table:table-cell table:style-name="ce8" office:value-type="string" calcext:value-type="string">
            <text:p>1ドローする</text:p>
          </table:table-cell>
          <table:table-cell table:formula="of:=IFERROR(VLOOKUP([.$V252];[$遺業能力番号.$A$1:$遺業能力番号.$B$9];2;0);0)" office:value-type="float" office:value="4" calcext:value-type="float">
            <text:p>4</text:p>
          </table:table-cell>
          <table:table-cell office:value-type="string" calcext:value-type="string">
            <text:p>https://one-draw.jp/ijinden/cardlist/003/card/03_023.png</text:p>
          </table:table-cell>
          <table:table-cell table:formula="of:=CONCATENATE([$JSON.$A$1];[.$C252];[$JSON.$B$1];[.$E252];[$JSON.$C$1];[.$F252];[$JSON.$D$1];IF(ISNA([.$S252]);&quot;null&quot;;&quot;&quot;&quot;&quot;&amp;[.$S252]&amp;&quot;&quot;&quot;&quot;);[$JSON.$E$1];[.$U252];[$JSON.$F$1];IF(ISNA([.$V252]);&quot;null&quot;;&quot;&quot;&quot;&quot;&amp;[.$V252]&amp;&quot;&quot;&quot;&quot;);[$JSON.$G$1];[.$X252];[$JSON.$H$1];[.$H252];[$JSON.$I$1];[.J252];[$JSON.$J$1];[.$L252];[$JSON.$K$1];[.$O252];[$JSON.$L$1];[.$N252];[$JSON.$M$1];[.$R252];[$JSON.$N$1];[.$T252];[$JSON.$O$1];[.$W252];[$JSON.$P$1];[.$A252];[$JSON.$Q$1];[.$B252];[$JSON.$R$1])" office:value-type="string" office:string-value="{&quot;id&quot;:&quot;3-23&quot;,&quot;name&quot;:&quot;トマス・ニューコメン&quot;,&quot;kana&quot;:&quot;とますにゅーこめん&quot;,&quot;traitText&quot;:null,&quot;ruleText&quot;:&quot;これが戦場にいる間、自分の戦場の装備しているイジンは「破壊されたとき、自分の魔力ゾーンのマリョク1つを手札に戻して発動できる。これを破壊されていない状態にする」を得る。&quot;,&quot;legacyText&quot;:&quot;1ドローする&quot;,&quot;imageUrl&quot;:&quot;https://one-draw.jp/ijinden/cardlist/003/card/03_023.png&quot;,&quot;expansion&quot;:35,&quot;rarity&quot;:1,&quot;type&quot;:1,&quot;level&quot;:4,&quot;color&quot;:2,&quot;term&quot;:0,&quot;trait&quot;:0,&quot;legacy&quot;:4,&quot;orderTable&quot;:251,&quot;orderDeck&quot;:121}," calcext:value-type="string">
            <text:p>{"id":"3-23","name":"トマス・ニューコメン","kana":"とますにゅーこめん","traitText":null,"ruleText":"これが戦場にいる間、自分の戦場の装備しているイジンは「破壊されたとき、自分の魔力ゾーンのマリョク1つを手札に戻して発動できる。これを破壊されていない状態にする」を得る。","legacyText":"1ドローする","imageUrl":"https://one-draw.jp/ijinden/cardlist/003/card/03_023.png","expansion":35,"rarity":1,"type":1,"level":4,"color":2,"term":0,"trait":0,"legacy":4,"orderTable":251,"orderDeck":121},</text:p>
          </table:table-cell>
          <table:table-cell table:number-columns-repeated="16347"/>
        </table:table-row>
        <table:table-row table:style-name="ro2">
          <table:table-cell office:value-type="float" office:value="252" calcext:value-type="float">
            <text:p>252</text:p>
          </table:table-cell>
          <table:table-cell office:value-type="float" office:value="161" calcext:value-type="float">
            <text:p>161</text:p>
          </table:table-cell>
          <table:table-cell office:value-type="string" calcext:value-type="string">
            <text:p>3-24</text:p>
          </table:table-cell>
          <table:table-cell office:value-type="float" office:value="24" calcext:value-type="float">
            <text:p>24</text:p>
          </table:table-cell>
          <table:table-cell office:value-type="string" calcext:value-type="string">
            <text:p>アダム・ラクスマン</text:p>
          </table:table-cell>
          <table:table-cell office:value-type="string" calcext:value-type="string">
            <text:p>あだむらくすまん</text:p>
          </table:table-cell>
          <table:table-cell office:value-type="string" calcext:value-type="string">
            <text:p>第３弾ブースターパック</text:p>
          </table:table-cell>
          <table:table-cell table:formula="of:=VLOOKUP([.G253];[$収録番号.$A$1:$収録番号.$B$9];2;0)" office:value-type="float" office:value="35" calcext:value-type="float">
            <text:p>35</text:p>
          </table:table-cell>
          <table:table-cell office:value-type="string" calcext:value-type="string">
            <text:p>N</text:p>
          </table:table-cell>
          <table:table-cell table:formula="of:=VLOOKUP([.I253];[$レアリティ番号.$A$1:$レアリティ番号.$B$4];2;0)" office:value-type="float" office:value="1" calcext:value-type="float">
            <text:p>1</text:p>
          </table:table-cell>
          <table:table-cell office:value-type="string" calcext:value-type="string">
            <text:p>イジン</text:p>
          </table:table-cell>
          <table:table-cell table:formula="of:=VLOOKUP([.K253];[$種類番号.$A$1:$種類番号.$B$4];2;0)" office:value-type="float" office:value="1" calcext:value-type="float">
            <text:p>1</text:p>
          </table:table-cell>
          <table:table-cell office:value-type="string" calcext:value-type="string">
            <text:p>青</text:p>
          </table:table-cell>
          <table:table-cell table:formula="of:=VLOOKUP([.M253];[$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5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53];[$特性番号.$A$1:$特性番号.$B$8];2;0);0)" office:value-type="float" office:value="0" calcext:value-type="float">
            <text:p>0</text:p>
          </table:table-cell>
          <table:table-cell office:value-type="string" calcext:value-type="string">
            <text:p>この能力はターンに1回しか発動しない。能力によって「航海」を持つイジンが自分の戦場を離れたとき、自分の手札のレベル3以下の青のイジン1体を指定して発動できる。そのイジンを戦場に置く。¶ブロック+2000</text:p>
          </table:table-cell>
          <table:table-cell table:style-name="ce8" table:formula="of:=NA()" office:value-type="string" office:string-value="" calcext:value-type="error">
            <text:p>#N/A</text:p>
          </table:table-cell>
          <table:table-cell table:formula="of:=IFERROR(VLOOKUP([.$V253];[$遺業能力番号.$A$1:$遺業能力番号.$B$9];2;0);0)" office:value-type="float" office:value="0" calcext:value-type="float">
            <text:p>0</text:p>
          </table:table-cell>
          <table:table-cell office:value-type="string" calcext:value-type="string">
            <text:p>https://one-draw.jp/ijinden/cardlist/003/card/03_024.png</text:p>
          </table:table-cell>
          <table:table-cell table:formula="of:=CONCATENATE([$JSON.$A$1];[.$C253];[$JSON.$B$1];[.$E253];[$JSON.$C$1];[.$F253];[$JSON.$D$1];IF(ISNA([.$S253]);&quot;null&quot;;&quot;&quot;&quot;&quot;&amp;[.$S253]&amp;&quot;&quot;&quot;&quot;);[$JSON.$E$1];[.$U253];[$JSON.$F$1];IF(ISNA([.$V253]);&quot;null&quot;;&quot;&quot;&quot;&quot;&amp;[.$V253]&amp;&quot;&quot;&quot;&quot;);[$JSON.$G$1];[.$X253];[$JSON.$H$1];[.$H253];[$JSON.$I$1];[.J253];[$JSON.$J$1];[.$L253];[$JSON.$K$1];[.$O253];[$JSON.$L$1];[.$N253];[$JSON.$M$1];[.$R253];[$JSON.$N$1];[.$T253];[$JSON.$O$1];[.$W253];[$JSON.$P$1];[.$A253];[$JSON.$Q$1];[.$B253];[$JSON.$R$1])" office:value-type="string" office:string-value="{&quot;id&quot;:&quot;3-24&quot;,&quot;name&quot;:&quot;アダム・ラクスマン&quot;,&quot;kana&quot;:&quot;あだむらくすまん&quot;,&quot;traitText&quot;:null,&quot;ruleText&quot;:&quot;この能力はターンに1回しか発動しない。能力によって「航海」を持つイジンが自分の戦場を離れたとき、自分の手札のレベル3以下の青のイジン1体を指定して発動できる。そのイジンを戦場に置く。¶ブロック+2000&quot;,&quot;legacyText&quot;:null,&quot;imageUrl&quot;:&quot;https://one-draw.jp/ijinden/cardlist/003/card/03_024.png&quot;,&quot;expansion&quot;:35,&quot;rarity&quot;:1,&quot;type&quot;:1,&quot;level&quot;:5,&quot;color&quot;:2,&quot;term&quot;:0,&quot;trait&quot;:0,&quot;legacy&quot;:0,&quot;orderTable&quot;:252,&quot;orderDeck&quot;:161}," calcext:value-type="string">
            <text:p>{"id":"3-24","name":"アダム・ラクスマン","kana":"あだむらくすまん","traitText":null,"ruleText":"この能力はターンに1回しか発動しない。能力によって「航海」を持つイジンが自分の戦場を離れたとき、自分の手札のレベル3以下の青のイジン1体を指定して発動できる。そのイジンを戦場に置く。¶ブロック+2000","legacyText":null,"imageUrl":"https://one-draw.jp/ijinden/cardlist/003/card/03_024.png","expansion":35,"rarity":1,"type":1,"level":5,"color":2,"term":0,"trait":0,"legacy":0,"orderTable":252,"orderDeck":161},</text:p>
          </table:table-cell>
          <table:table-cell table:number-columns-repeated="16347"/>
        </table:table-row>
        <table:table-row table:style-name="ro2">
          <table:table-cell office:value-type="float" office:value="253" calcext:value-type="float">
            <text:p>253</text:p>
          </table:table-cell>
          <table:table-cell office:value-type="float" office:value="41" calcext:value-type="float">
            <text:p>41</text:p>
          </table:table-cell>
          <table:table-cell office:value-type="string" calcext:value-type="string">
            <text:p>3-25</text:p>
          </table:table-cell>
          <table:table-cell office:value-type="float" office:value="25" calcext:value-type="float">
            <text:p>25</text:p>
          </table:table-cell>
          <table:table-cell office:value-type="string" calcext:value-type="string">
            <text:p>大黒屋光太夫</text:p>
          </table:table-cell>
          <table:table-cell office:value-type="string" calcext:value-type="string">
            <text:p>だいこくやこうだゆう</text:p>
          </table:table-cell>
          <table:table-cell office:value-type="string" calcext:value-type="string">
            <text:p>第３弾ブースターパック</text:p>
          </table:table-cell>
          <table:table-cell table:formula="of:=VLOOKUP([.G254];[$収録番号.$A$1:$収録番号.$B$9];2;0)" office:value-type="float" office:value="35" calcext:value-type="float">
            <text:p>35</text:p>
          </table:table-cell>
          <table:table-cell office:value-type="string" calcext:value-type="string">
            <text:p>N</text:p>
          </table:table-cell>
          <table:table-cell table:formula="of:=VLOOKUP([.I254];[$レアリティ番号.$A$1:$レアリティ番号.$B$4];2;0)" office:value-type="float" office:value="1" calcext:value-type="float">
            <text:p>1</text:p>
          </table:table-cell>
          <table:table-cell office:value-type="string" calcext:value-type="string">
            <text:p>イジン</text:p>
          </table:table-cell>
          <table:table-cell table:formula="of:=VLOOKUP([.K254];[$種類番号.$A$1:$種類番号.$B$4];2;0)" office:value-type="float" office:value="1" calcext:value-type="float">
            <text:p>1</text:p>
          </table:table-cell>
          <table:table-cell office:value-type="string" calcext:value-type="string">
            <text:p>青</text:p>
          </table:table-cell>
          <table:table-cell table:formula="of:=VLOOKUP([.M254];[$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航海</text:p>
          </table:table-cell>
          <table:table-cell table:formula="of:=IFERROR(VLOOKUP([.$Q254];[$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254];[$特性番号.$A$1:$特性番号.$B$8];2;0);0)" office:value-type="float" office:value="0" calcext:value-type="float">
            <text:p>0</text:p>
          </table:table-cell>
          <table:table-cell office:value-type="string" calcext:value-type="string">
            <text:p>航海 - アタッカーになったとき、相手の魔力ゾーンの裏のカード1つを指定して発動できる。そのカードと、これを手札に戻す。</text:p>
          </table:table-cell>
          <table:table-cell table:style-name="ce8" office:value-type="string" calcext:value-type="string">
            <text:p>1ドローする</text:p>
          </table:table-cell>
          <table:table-cell table:formula="of:=IFERROR(VLOOKUP([.$V254];[$遺業能力番号.$A$1:$遺業能力番号.$B$9];2;0);0)" office:value-type="float" office:value="4" calcext:value-type="float">
            <text:p>4</text:p>
          </table:table-cell>
          <table:table-cell office:value-type="string" calcext:value-type="string">
            <text:p>https://one-draw.jp/ijinden/cardlist/003/card/03_025.png</text:p>
          </table:table-cell>
          <table:table-cell table:formula="of:=CONCATENATE([$JSON.$A$1];[.$C254];[$JSON.$B$1];[.$E254];[$JSON.$C$1];[.$F254];[$JSON.$D$1];IF(ISNA([.$S254]);&quot;null&quot;;&quot;&quot;&quot;&quot;&amp;[.$S254]&amp;&quot;&quot;&quot;&quot;);[$JSON.$E$1];[.$U254];[$JSON.$F$1];IF(ISNA([.$V254]);&quot;null&quot;;&quot;&quot;&quot;&quot;&amp;[.$V254]&amp;&quot;&quot;&quot;&quot;);[$JSON.$G$1];[.$X254];[$JSON.$H$1];[.$H254];[$JSON.$I$1];[.J254];[$JSON.$J$1];[.$L254];[$JSON.$K$1];[.$O254];[$JSON.$L$1];[.$N254];[$JSON.$M$1];[.$R254];[$JSON.$N$1];[.$T254];[$JSON.$O$1];[.$W254];[$JSON.$P$1];[.$A254];[$JSON.$Q$1];[.$B254];[$JSON.$R$1])" office:value-type="string" office:string-value="{&quot;id&quot;:&quot;3-25&quot;,&quot;name&quot;:&quot;大黒屋光太夫&quot;,&quot;kana&quot;:&quot;だいこくやこうだゆう&quot;,&quot;traitText&quot;:null,&quot;ruleText&quot;:&quot;航海 - アタッカーになったとき、相手の魔力ゾーンの裏のカード1つを指定して発動できる。そのカードと、これを手札に戻す。&quot;,&quot;legacyText&quot;:&quot;1ドローする&quot;,&quot;imageUrl&quot;:&quot;https://one-draw.jp/ijinden/cardlist/003/card/03_025.png&quot;,&quot;expansion&quot;:35,&quot;rarity&quot;:1,&quot;type&quot;:1,&quot;level&quot;:2,&quot;color&quot;:2,&quot;term&quot;:1,&quot;trait&quot;:0,&quot;legacy&quot;:4,&quot;orderTable&quot;:253,&quot;orderDeck&quot;:41}," calcext:value-type="string">
            <text:p>{"id":"3-25","name":"大黒屋光太夫","kana":"だいこくやこうだゆう","traitText":null,"ruleText":"航海 - アタッカーになったとき、相手の魔力ゾーンの裏のカード1つを指定して発動できる。そのカードと、これを手札に戻す。","legacyText":"1ドローする","imageUrl":"https://one-draw.jp/ijinden/cardlist/003/card/03_025.png","expansion":35,"rarity":1,"type":1,"level":2,"color":2,"term":1,"trait":0,"legacy":4,"orderTable":253,"orderDeck":41},</text:p>
          </table:table-cell>
          <table:table-cell table:number-columns-repeated="16347"/>
        </table:table-row>
        <table:table-row table:style-name="ro2">
          <table:table-cell office:value-type="float" office:value="254" calcext:value-type="float">
            <text:p>254</text:p>
          </table:table-cell>
          <table:table-cell office:value-type="float" office:value="10" calcext:value-type="float">
            <text:p>10</text:p>
          </table:table-cell>
          <table:table-cell office:value-type="string" calcext:value-type="string">
            <text:p>3-26</text:p>
          </table:table-cell>
          <table:table-cell office:value-type="float" office:value="26" calcext:value-type="float">
            <text:p>26</text:p>
          </table:table-cell>
          <table:table-cell office:value-type="string" calcext:value-type="string">
            <text:p>ニコライ・レザノフ</text:p>
          </table:table-cell>
          <table:table-cell office:value-type="string" calcext:value-type="string">
            <text:p>にこらいれざのふ</text:p>
          </table:table-cell>
          <table:table-cell office:value-type="string" calcext:value-type="string">
            <text:p>第３弾ブースターパック</text:p>
          </table:table-cell>
          <table:table-cell table:formula="of:=VLOOKUP([.G255];[$収録番号.$A$1:$収録番号.$B$9];2;0)" office:value-type="float" office:value="35" calcext:value-type="float">
            <text:p>35</text:p>
          </table:table-cell>
          <table:table-cell office:value-type="string" calcext:value-type="string">
            <text:p>N</text:p>
          </table:table-cell>
          <table:table-cell table:formula="of:=VLOOKUP([.I255];[$レアリティ番号.$A$1:$レアリティ番号.$B$4];2;0)" office:value-type="float" office:value="1" calcext:value-type="float">
            <text:p>1</text:p>
          </table:table-cell>
          <table:table-cell office:value-type="string" calcext:value-type="string">
            <text:p>イジン</text:p>
          </table:table-cell>
          <table:table-cell table:formula="of:=VLOOKUP([.K255];[$種類番号.$A$1:$種類番号.$B$4];2;0)" office:value-type="float" office:value="1" calcext:value-type="float">
            <text:p>1</text:p>
          </table:table-cell>
          <table:table-cell office:value-type="string" calcext:value-type="string">
            <text:p>青</text:p>
          </table:table-cell>
          <table:table-cell table:formula="of:=VLOOKUP([.M255];[$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office:value-type="string" calcext:value-type="string">
            <text:p>航海</text:p>
          </table:table-cell>
          <table:table-cell table:formula="of:=IFERROR(VLOOKUP([.$Q255];[$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255];[$特性番号.$A$1:$特性番号.$B$8];2;0);0)" office:value-type="float" office:value="0" calcext:value-type="float">
            <text:p>0</text:p>
          </table:table-cell>
          <table:table-cell office:value-type="string" calcext:value-type="string">
            <text:p>航海 - アタッカーになったときに発動する。『ブロック+』能力を持つアタッカーすべては、このターンに限り「ガーディアンにブロックされたとき、これを起こす」を得る。</text:p>
          </table:table-cell>
          <table:table-cell table:style-name="ce8" table:formula="of:=NA()" office:value-type="string" office:string-value="" calcext:value-type="error">
            <text:p>#N/A</text:p>
          </table:table-cell>
          <table:table-cell table:formula="of:=IFERROR(VLOOKUP([.$V255];[$遺業能力番号.$A$1:$遺業能力番号.$B$9];2;0);0)" office:value-type="float" office:value="0" calcext:value-type="float">
            <text:p>0</text:p>
          </table:table-cell>
          <table:table-cell office:value-type="string" calcext:value-type="string">
            <text:p>https://one-draw.jp/ijinden/cardlist/003/card/03_026.png</text:p>
          </table:table-cell>
          <table:table-cell table:formula="of:=CONCATENATE([$JSON.$A$1];[.$C255];[$JSON.$B$1];[.$E255];[$JSON.$C$1];[.$F255];[$JSON.$D$1];IF(ISNA([.$S255]);&quot;null&quot;;&quot;&quot;&quot;&quot;&amp;[.$S255]&amp;&quot;&quot;&quot;&quot;);[$JSON.$E$1];[.$U255];[$JSON.$F$1];IF(ISNA([.$V255]);&quot;null&quot;;&quot;&quot;&quot;&quot;&amp;[.$V255]&amp;&quot;&quot;&quot;&quot;);[$JSON.$G$1];[.$X255];[$JSON.$H$1];[.$H255];[$JSON.$I$1];[.J255];[$JSON.$J$1];[.$L255];[$JSON.$K$1];[.$O255];[$JSON.$L$1];[.$N255];[$JSON.$M$1];[.$R255];[$JSON.$N$1];[.$T255];[$JSON.$O$1];[.$W255];[$JSON.$P$1];[.$A255];[$JSON.$Q$1];[.$B255];[$JSON.$R$1])" office:value-type="string" office:string-value="{&quot;id&quot;:&quot;3-26&quot;,&quot;name&quot;:&quot;ニコライ・レザノフ&quot;,&quot;kana&quot;:&quot;にこらいれざのふ&quot;,&quot;traitText&quot;:null,&quot;ruleText&quot;:&quot;航海 - アタッカーになったときに発動する。『ブロック+』能力を持つアタッカーすべては、このターンに限り「ガーディアンにブロックされたとき、これを起こす」を得る。&quot;,&quot;legacyText&quot;:null,&quot;imageUrl&quot;:&quot;https://one-draw.jp/ijinden/cardlist/003/card/03_026.png&quot;,&quot;expansion&quot;:35,&quot;rarity&quot;:1,&quot;type&quot;:1,&quot;level&quot;:1,&quot;color&quot;:2,&quot;term&quot;:1,&quot;trait&quot;:0,&quot;legacy&quot;:0,&quot;orderTable&quot;:254,&quot;orderDeck&quot;:10}," calcext:value-type="string">
            <text:p>{"id":"3-26","name":"ニコライ・レザノフ","kana":"にこらいれざのふ","traitText":null,"ruleText":"航海 - アタッカーになったときに発動する。『ブロック+』能力を持つアタッカーすべては、このターンに限り「ガーディアンにブロックされたとき、これを起こす」を得る。","legacyText":null,"imageUrl":"https://one-draw.jp/ijinden/cardlist/003/card/03_026.png","expansion":35,"rarity":1,"type":1,"level":1,"color":2,"term":1,"trait":0,"legacy":0,"orderTable":254,"orderDeck":10},</text:p>
          </table:table-cell>
          <table:table-cell table:number-columns-repeated="16347"/>
        </table:table-row>
        <table:table-row table:style-name="ro2">
          <table:table-cell office:value-type="float" office:value="255" calcext:value-type="float">
            <text:p>255</text:p>
          </table:table-cell>
          <table:table-cell office:value-type="float" office:value="90" calcext:value-type="float">
            <text:p>90</text:p>
          </table:table-cell>
          <table:table-cell office:value-type="string" calcext:value-type="string">
            <text:p>3-27</text:p>
          </table:table-cell>
          <table:table-cell office:value-type="float" office:value="27" calcext:value-type="float">
            <text:p>27</text:p>
          </table:table-cell>
          <table:table-cell office:value-type="string" calcext:value-type="string">
            <text:p>小野小町</text:p>
          </table:table-cell>
          <table:table-cell office:value-type="string" calcext:value-type="string">
            <text:p>おののこまち</text:p>
          </table:table-cell>
          <table:table-cell office:value-type="string" calcext:value-type="string">
            <text:p>第３弾ブースターパック</text:p>
          </table:table-cell>
          <table:table-cell table:formula="of:=VLOOKUP([.G256];[$収録番号.$A$1:$収録番号.$B$9];2;0)" office:value-type="float" office:value="35" calcext:value-type="float">
            <text:p>35</text:p>
          </table:table-cell>
          <table:table-cell office:value-type="string" calcext:value-type="string">
            <text:p>R</text:p>
          </table:table-cell>
          <table:table-cell table:formula="of:=VLOOKUP([.I256];[$レアリティ番号.$A$1:$レアリティ番号.$B$4];2;0)" office:value-type="float" office:value="2" calcext:value-type="float">
            <text:p>2</text:p>
          </table:table-cell>
          <table:table-cell office:value-type="string" calcext:value-type="string">
            <text:p>イジン</text:p>
          </table:table-cell>
          <table:table-cell table:formula="of:=VLOOKUP([.K256];[$種類番号.$A$1:$種類番号.$B$4];2;0)" office:value-type="float" office:value="1" calcext:value-type="float">
            <text:p>1</text:p>
          </table:table-cell>
          <table:table-cell office:value-type="string" calcext:value-type="string">
            <text:p>緑</text:p>
          </table:table-cell>
          <table:table-cell table:formula="of:=VLOOKUP([.M256];[$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執筆</text:p>
          </table:table-cell>
          <table:table-cell table:formula="of:=IFERROR(VLOOKUP([.$Q256];[$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256];[$特性番号.$A$1:$特性番号.$B$8];2;0);0)" office:value-type="float" office:value="0" calcext:value-type="float">
            <text:p>0</text:p>
          </table:table-cell>
          <table:table-cell office:value-type="string" calcext:value-type="string">
            <text:p>執筆 - 戦場にハイケイが置かれたとき、戦場のイジン1体を指定して発動できる。そのイジンは、このターンに限り「特性：美術 音楽」を得る。¶これが破壊されたとき、戦場の「美術」イジンと「音楽」イジンすべてを裏向きで魔力ゾーンに置く。</text:p>
          </table:table-cell>
          <table:table-cell table:style-name="ce8" office:value-type="string" calcext:value-type="string">
            <text:p>木霊</text:p>
          </table:table-cell>
          <table:table-cell table:formula="of:=IFERROR(VLOOKUP([.$V256];[$遺業能力番号.$A$1:$遺業能力番号.$B$9];2;0);0)" office:value-type="float" office:value="8" calcext:value-type="float">
            <text:p>8</text:p>
          </table:table-cell>
          <table:table-cell office:value-type="string" calcext:value-type="string">
            <text:p>https://one-draw.jp/ijinden/cardlist/003/card/03_027.png</text:p>
          </table:table-cell>
          <table:table-cell table:formula="of:=CONCATENATE([$JSON.$A$1];[.$C256];[$JSON.$B$1];[.$E256];[$JSON.$C$1];[.$F256];[$JSON.$D$1];IF(ISNA([.$S256]);&quot;null&quot;;&quot;&quot;&quot;&quot;&amp;[.$S256]&amp;&quot;&quot;&quot;&quot;);[$JSON.$E$1];[.$U256];[$JSON.$F$1];IF(ISNA([.$V256]);&quot;null&quot;;&quot;&quot;&quot;&quot;&amp;[.$V256]&amp;&quot;&quot;&quot;&quot;);[$JSON.$G$1];[.$X256];[$JSON.$H$1];[.$H256];[$JSON.$I$1];[.J256];[$JSON.$J$1];[.$L256];[$JSON.$K$1];[.$O256];[$JSON.$L$1];[.$N256];[$JSON.$M$1];[.$R256];[$JSON.$N$1];[.$T256];[$JSON.$O$1];[.$W256];[$JSON.$P$1];[.$A256];[$JSON.$Q$1];[.$B256];[$JSON.$R$1])" office:value-type="string" office:string-value="{&quot;id&quot;:&quot;3-27&quot;,&quot;name&quot;:&quot;小野小町&quot;,&quot;kana&quot;:&quot;おののこまち&quot;,&quot;traitText&quot;:null,&quot;ruleText&quot;:&quot;執筆 - 戦場にハイケイが置かれたとき、戦場のイジン1体を指定して発動できる。そのイジンは、このターンに限り「特性：美術 音楽」を得る。¶これが破壊されたとき、戦場の「美術」イジンと「音楽」イジンすべてを裏向きで魔力ゾーンに置く。&quot;,&quot;legacyText&quot;:&quot;木霊&quot;,&quot;imageUrl&quot;:&quot;https://one-draw.jp/ijinden/cardlist/003/card/03_027.png&quot;,&quot;expansion&quot;:35,&quot;rarity&quot;:2,&quot;type&quot;:1,&quot;level&quot;:3,&quot;color&quot;:4,&quot;term&quot;:2,&quot;trait&quot;:0,&quot;legacy&quot;:8,&quot;orderTable&quot;:255,&quot;orderDeck&quot;:90}," calcext:value-type="string">
            <text:p>{"id":"3-27","name":"小野小町","kana":"おののこまち","traitText":null,"ruleText":"執筆 - 戦場にハイケイが置かれたとき、戦場のイジン1体を指定して発動できる。そのイジンは、このターンに限り「特性：美術 音楽」を得る。¶これが破壊されたとき、戦場の「美術」イジンと「音楽」イジンすべてを裏向きで魔力ゾーンに置く。","legacyText":"木霊","imageUrl":"https://one-draw.jp/ijinden/cardlist/003/card/03_027.png","expansion":35,"rarity":2,"type":1,"level":3,"color":4,"term":2,"trait":0,"legacy":8,"orderTable":255,"orderDeck":90},</text:p>
          </table:table-cell>
          <table:table-cell table:number-columns-repeated="16347"/>
        </table:table-row>
        <table:table-row table:style-name="ro2">
          <table:table-cell office:value-type="float" office:value="256" calcext:value-type="float">
            <text:p>256</text:p>
          </table:table-cell>
          <table:table-cell office:value-type="float" office:value="91" calcext:value-type="float">
            <text:p>91</text:p>
          </table:table-cell>
          <table:table-cell office:value-type="string" calcext:value-type="string">
            <text:p>3-28</text:p>
          </table:table-cell>
          <table:table-cell office:value-type="float" office:value="28" calcext:value-type="float">
            <text:p>28</text:p>
          </table:table-cell>
          <table:table-cell office:value-type="string" calcext:value-type="string">
            <text:p>松尾芭蕉</text:p>
          </table:table-cell>
          <table:table-cell office:value-type="string" calcext:value-type="string">
            <text:p>まつおばしょう</text:p>
          </table:table-cell>
          <table:table-cell office:value-type="string" calcext:value-type="string">
            <text:p>第３弾ブースターパック</text:p>
          </table:table-cell>
          <table:table-cell table:formula="of:=VLOOKUP([.G257];[$収録番号.$A$1:$収録番号.$B$9];2;0)" office:value-type="float" office:value="35" calcext:value-type="float">
            <text:p>35</text:p>
          </table:table-cell>
          <table:table-cell office:value-type="string" calcext:value-type="string">
            <text:p>N</text:p>
          </table:table-cell>
          <table:table-cell table:formula="of:=VLOOKUP([.I257];[$レアリティ番号.$A$1:$レアリティ番号.$B$4];2;0)" office:value-type="float" office:value="1" calcext:value-type="float">
            <text:p>1</text:p>
          </table:table-cell>
          <table:table-cell office:value-type="string" calcext:value-type="string">
            <text:p>イジン</text:p>
          </table:table-cell>
          <table:table-cell table:formula="of:=VLOOKUP([.K257];[$種類番号.$A$1:$種類番号.$B$4];2;0)" office:value-type="float" office:value="1" calcext:value-type="float">
            <text:p>1</text:p>
          </table:table-cell>
          <table:table-cell office:value-type="string" calcext:value-type="string">
            <text:p>緑</text:p>
          </table:table-cell>
          <table:table-cell table:formula="of:=VLOOKUP([.M257];[$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執筆</text:p>
          </table:table-cell>
          <table:table-cell table:formula="of:=IFERROR(VLOOKUP([.$Q257];[$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257];[$特性番号.$A$1:$特性番号.$B$8];2;0);0)" office:value-type="float" office:value="0" calcext:value-type="float">
            <text:p>0</text:p>
          </table:table-cell>
          <table:table-cell office:value-type="string" calcext:value-type="string">
            <text:p>スタンド¶執筆 - 緑のハイケイが戦場に置かれたとき、1ドローして、これを裏向きで魔力ゾーンに置く。</text:p>
          </table:table-cell>
          <table:table-cell table:style-name="ce8" office:value-type="string" calcext:value-type="string">
            <text:p>1ドローする</text:p>
          </table:table-cell>
          <table:table-cell table:formula="of:=IFERROR(VLOOKUP([.$V257];[$遺業能力番号.$A$1:$遺業能力番号.$B$9];2;0);0)" office:value-type="float" office:value="4" calcext:value-type="float">
            <text:p>4</text:p>
          </table:table-cell>
          <table:table-cell office:value-type="string" calcext:value-type="string">
            <text:p>https://one-draw.jp/ijinden/cardlist/003/card/03_028.png</text:p>
          </table:table-cell>
          <table:table-cell table:formula="of:=CONCATENATE([$JSON.$A$1];[.$C257];[$JSON.$B$1];[.$E257];[$JSON.$C$1];[.$F257];[$JSON.$D$1];IF(ISNA([.$S257]);&quot;null&quot;;&quot;&quot;&quot;&quot;&amp;[.$S257]&amp;&quot;&quot;&quot;&quot;);[$JSON.$E$1];[.$U257];[$JSON.$F$1];IF(ISNA([.$V257]);&quot;null&quot;;&quot;&quot;&quot;&quot;&amp;[.$V257]&amp;&quot;&quot;&quot;&quot;);[$JSON.$G$1];[.$X257];[$JSON.$H$1];[.$H257];[$JSON.$I$1];[.J257];[$JSON.$J$1];[.$L257];[$JSON.$K$1];[.$O257];[$JSON.$L$1];[.$N257];[$JSON.$M$1];[.$R257];[$JSON.$N$1];[.$T257];[$JSON.$O$1];[.$W257];[$JSON.$P$1];[.$A257];[$JSON.$Q$1];[.$B257];[$JSON.$R$1])" office:value-type="string" office:string-value="{&quot;id&quot;:&quot;3-28&quot;,&quot;name&quot;:&quot;松尾芭蕉&quot;,&quot;kana&quot;:&quot;まつおばしょう&quot;,&quot;traitText&quot;:null,&quot;ruleText&quot;:&quot;スタンド¶執筆 - 緑のハイケイが戦場に置かれたとき、1ドローして、これを裏向きで魔力ゾーンに置く。&quot;,&quot;legacyText&quot;:&quot;1ドローする&quot;,&quot;imageUrl&quot;:&quot;https://one-draw.jp/ijinden/cardlist/003/card/03_028.png&quot;,&quot;expansion&quot;:35,&quot;rarity&quot;:1,&quot;type&quot;:1,&quot;level&quot;:3,&quot;color&quot;:4,&quot;term&quot;:2,&quot;trait&quot;:0,&quot;legacy&quot;:4,&quot;orderTable&quot;:256,&quot;orderDeck&quot;:91}," calcext:value-type="string">
            <text:p>{"id":"3-28","name":"松尾芭蕉","kana":"まつおばしょう","traitText":null,"ruleText":"スタンド¶執筆 - 緑のハイケイが戦場に置かれたとき、1ドローして、これを裏向きで魔力ゾーンに置く。","legacyText":"1ドローする","imageUrl":"https://one-draw.jp/ijinden/cardlist/003/card/03_028.png","expansion":35,"rarity":1,"type":1,"level":3,"color":4,"term":2,"trait":0,"legacy":4,"orderTable":256,"orderDeck":91},</text:p>
          </table:table-cell>
          <table:table-cell table:number-columns-repeated="16347"/>
        </table:table-row>
        <table:table-row table:style-name="ro2">
          <table:table-cell office:value-type="float" office:value="257" calcext:value-type="float">
            <text:p>257</text:p>
          </table:table-cell>
          <table:table-cell office:value-type="float" office:value="129" calcext:value-type="float">
            <text:p>129</text:p>
          </table:table-cell>
          <table:table-cell office:value-type="string" calcext:value-type="string">
            <text:p>3-29</text:p>
          </table:table-cell>
          <table:table-cell office:value-type="float" office:value="29" calcext:value-type="float">
            <text:p>29</text:p>
          </table:table-cell>
          <table:table-cell office:value-type="string" calcext:value-type="string">
            <text:p>朱舜水</text:p>
          </table:table-cell>
          <table:table-cell office:value-type="string" calcext:value-type="string">
            <text:p>しゅしゅんすい</text:p>
          </table:table-cell>
          <table:table-cell office:value-type="string" calcext:value-type="string">
            <text:p>第３弾ブースターパック</text:p>
          </table:table-cell>
          <table:table-cell table:formula="of:=VLOOKUP([.G258];[$収録番号.$A$1:$収録番号.$B$9];2;0)" office:value-type="float" office:value="35" calcext:value-type="float">
            <text:p>35</text:p>
          </table:table-cell>
          <table:table-cell office:value-type="string" calcext:value-type="string">
            <text:p>N</text:p>
          </table:table-cell>
          <table:table-cell table:formula="of:=VLOOKUP([.I258];[$レアリティ番号.$A$1:$レアリティ番号.$B$4];2;0)" office:value-type="float" office:value="1" calcext:value-type="float">
            <text:p>1</text:p>
          </table:table-cell>
          <table:table-cell office:value-type="string" calcext:value-type="string">
            <text:p>イジン</text:p>
          </table:table-cell>
          <table:table-cell table:formula="of:=VLOOKUP([.K258];[$種類番号.$A$1:$種類番号.$B$4];2;0)" office:value-type="float" office:value="1" calcext:value-type="float">
            <text:p>1</text:p>
          </table:table-cell>
          <table:table-cell office:value-type="string" calcext:value-type="string">
            <text:p>緑</text:p>
          </table:table-cell>
          <table:table-cell table:formula="of:=VLOOKUP([.M258];[$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5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58];[$特性番号.$A$1:$特性番号.$B$8];2;0);0)" office:value-type="float" office:value="0" calcext:value-type="float">
            <text:p>0</text:p>
          </table:table-cell>
          <table:table-cell office:value-type="string" calcext:value-type="string">
            <text:p>能力によって自分の戦場のカードが起きたときに発動できる。自分の山札の上から1枚を裏のまま魔力ゾーンに置く。¶能力によって自分の戦場のカードが寝たとき、自分の魔力ゾーンのカード1つを指定して発動できる。そのカードを手札に戻す。</text:p>
          </table:table-cell>
          <table:table-cell table:style-name="ce8" office:value-type="string" calcext:value-type="string">
            <text:p>木霊</text:p>
          </table:table-cell>
          <table:table-cell table:formula="of:=IFERROR(VLOOKUP([.$V258];[$遺業能力番号.$A$1:$遺業能力番号.$B$9];2;0);0)" office:value-type="float" office:value="8" calcext:value-type="float">
            <text:p>8</text:p>
          </table:table-cell>
          <table:table-cell office:value-type="string" calcext:value-type="string">
            <text:p>https://one-draw.jp/ijinden/cardlist/003/card/03_029.png</text:p>
          </table:table-cell>
          <table:table-cell table:formula="of:=CONCATENATE([$JSON.$A$1];[.$C258];[$JSON.$B$1];[.$E258];[$JSON.$C$1];[.$F258];[$JSON.$D$1];IF(ISNA([.$S258]);&quot;null&quot;;&quot;&quot;&quot;&quot;&amp;[.$S258]&amp;&quot;&quot;&quot;&quot;);[$JSON.$E$1];[.$U258];[$JSON.$F$1];IF(ISNA([.$V258]);&quot;null&quot;;&quot;&quot;&quot;&quot;&amp;[.$V258]&amp;&quot;&quot;&quot;&quot;);[$JSON.$G$1];[.$X258];[$JSON.$H$1];[.$H258];[$JSON.$I$1];[.J258];[$JSON.$J$1];[.$L258];[$JSON.$K$1];[.$O258];[$JSON.$L$1];[.$N258];[$JSON.$M$1];[.$R258];[$JSON.$N$1];[.$T258];[$JSON.$O$1];[.$W258];[$JSON.$P$1];[.$A258];[$JSON.$Q$1];[.$B258];[$JSON.$R$1])" office:value-type="string" office:string-value="{&quot;id&quot;:&quot;3-29&quot;,&quot;name&quot;:&quot;朱舜水&quot;,&quot;kana&quot;:&quot;しゅしゅんすい&quot;,&quot;traitText&quot;:null,&quot;ruleText&quot;:&quot;能力によって自分の戦場のカードが起きたときに発動できる。自分の山札の上から1枚を裏のまま魔力ゾーンに置く。¶能力によって自分の戦場のカードが寝たとき、自分の魔力ゾーンのカード1つを指定して発動できる。そのカードを手札に戻す。&quot;,&quot;legacyText&quot;:&quot;木霊&quot;,&quot;imageUrl&quot;:&quot;https://one-draw.jp/ijinden/cardlist/003/card/03_029.png&quot;,&quot;expansion&quot;:35,&quot;rarity&quot;:1,&quot;type&quot;:1,&quot;level&quot;:4,&quot;color&quot;:4,&quot;term&quot;:0,&quot;trait&quot;:0,&quot;legacy&quot;:8,&quot;orderTable&quot;:257,&quot;orderDeck&quot;:129}," calcext:value-type="string">
            <text:p>{"id":"3-29","name":"朱舜水","kana":"しゅしゅんすい","traitText":null,"ruleText":"能力によって自分の戦場のカードが起きたときに発動できる。自分の山札の上から1枚を裏のまま魔力ゾーンに置く。¶能力によって自分の戦場のカードが寝たとき、自分の魔力ゾーンのカード1つを指定して発動できる。そのカードを手札に戻す。","legacyText":"木霊","imageUrl":"https://one-draw.jp/ijinden/cardlist/003/card/03_029.png","expansion":35,"rarity":1,"type":1,"level":4,"color":4,"term":0,"trait":0,"legacy":8,"orderTable":257,"orderDeck":129},</text:p>
          </table:table-cell>
          <table:table-cell table:number-columns-repeated="16347"/>
        </table:table-row>
        <table:table-row table:style-name="ro2">
          <table:table-cell office:value-type="float" office:value="258" calcext:value-type="float">
            <text:p>258</text:p>
          </table:table-cell>
          <table:table-cell office:value-type="float" office:value="48" calcext:value-type="float">
            <text:p>48</text:p>
          </table:table-cell>
          <table:table-cell office:value-type="string" calcext:value-type="string">
            <text:p>3-30</text:p>
          </table:table-cell>
          <table:table-cell office:value-type="float" office:value="30" calcext:value-type="float">
            <text:p>30</text:p>
          </table:table-cell>
          <table:table-cell office:value-type="string" calcext:value-type="string">
            <text:p>井原西鶴</text:p>
          </table:table-cell>
          <table:table-cell office:value-type="string" calcext:value-type="string">
            <text:p>いはらさいかく</text:p>
          </table:table-cell>
          <table:table-cell office:value-type="string" calcext:value-type="string">
            <text:p>第３弾ブースターパック</text:p>
          </table:table-cell>
          <table:table-cell table:formula="of:=VLOOKUP([.G259];[$収録番号.$A$1:$収録番号.$B$9];2;0)" office:value-type="float" office:value="35" calcext:value-type="float">
            <text:p>35</text:p>
          </table:table-cell>
          <table:table-cell office:value-type="string" calcext:value-type="string">
            <text:p>N</text:p>
          </table:table-cell>
          <table:table-cell table:formula="of:=VLOOKUP([.I259];[$レアリティ番号.$A$1:$レアリティ番号.$B$4];2;0)" office:value-type="float" office:value="1" calcext:value-type="float">
            <text:p>1</text:p>
          </table:table-cell>
          <table:table-cell office:value-type="string" calcext:value-type="string">
            <text:p>イジン</text:p>
          </table:table-cell>
          <table:table-cell table:formula="of:=VLOOKUP([.K259];[$種類番号.$A$1:$種類番号.$B$4];2;0)" office:value-type="float" office:value="1" calcext:value-type="float">
            <text:p>1</text:p>
          </table:table-cell>
          <table:table-cell office:value-type="string" calcext:value-type="string">
            <text:p>緑</text:p>
          </table:table-cell>
          <table:table-cell table:formula="of:=VLOOKUP([.M259];[$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執筆</text:p>
          </table:table-cell>
          <table:table-cell table:formula="of:=IFERROR(VLOOKUP([.$Q259];[$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259];[$特性番号.$A$1:$特性番号.$B$8];2;0);0)" office:value-type="float" office:value="0" calcext:value-type="float">
            <text:p>0</text:p>
          </table:table-cell>
          <table:table-cell office:value-type="string" calcext:value-type="string">
            <text:p>執筆 - ハイケイか「美術」イジンが戦場に置かれたとき、これを寝かせて発動できる。自分の山札の上から1枚を裏のまま魔力ゾーンに置く。</text:p>
          </table:table-cell>
          <table:table-cell table:style-name="ce8" table:formula="of:=NA()" office:value-type="string" office:string-value="" calcext:value-type="error">
            <text:p>#N/A</text:p>
          </table:table-cell>
          <table:table-cell table:formula="of:=IFERROR(VLOOKUP([.$V259];[$遺業能力番号.$A$1:$遺業能力番号.$B$9];2;0);0)" office:value-type="float" office:value="0" calcext:value-type="float">
            <text:p>0</text:p>
          </table:table-cell>
          <table:table-cell office:value-type="string" calcext:value-type="string">
            <text:p>https://one-draw.jp/ijinden/cardlist/003/card/03_030.png</text:p>
          </table:table-cell>
          <table:table-cell table:formula="of:=CONCATENATE([$JSON.$A$1];[.$C259];[$JSON.$B$1];[.$E259];[$JSON.$C$1];[.$F259];[$JSON.$D$1];IF(ISNA([.$S259]);&quot;null&quot;;&quot;&quot;&quot;&quot;&amp;[.$S259]&amp;&quot;&quot;&quot;&quot;);[$JSON.$E$1];[.$U259];[$JSON.$F$1];IF(ISNA([.$V259]);&quot;null&quot;;&quot;&quot;&quot;&quot;&amp;[.$V259]&amp;&quot;&quot;&quot;&quot;);[$JSON.$G$1];[.$X259];[$JSON.$H$1];[.$H259];[$JSON.$I$1];[.J259];[$JSON.$J$1];[.$L259];[$JSON.$K$1];[.$O259];[$JSON.$L$1];[.$N259];[$JSON.$M$1];[.$R259];[$JSON.$N$1];[.$T259];[$JSON.$O$1];[.$W259];[$JSON.$P$1];[.$A259];[$JSON.$Q$1];[.$B259];[$JSON.$R$1])" office:value-type="string" office:string-value="{&quot;id&quot;:&quot;3-30&quot;,&quot;name&quot;:&quot;井原西鶴&quot;,&quot;kana&quot;:&quot;いはらさいかく&quot;,&quot;traitText&quot;:null,&quot;ruleText&quot;:&quot;執筆 - ハイケイか「美術」イジンが戦場に置かれたとき、これを寝かせて発動できる。自分の山札の上から1枚を裏のまま魔力ゾーンに置く。&quot;,&quot;legacyText&quot;:null,&quot;imageUrl&quot;:&quot;https://one-draw.jp/ijinden/cardlist/003/card/03_030.png&quot;,&quot;expansion&quot;:35,&quot;rarity&quot;:1,&quot;type&quot;:1,&quot;level&quot;:2,&quot;color&quot;:4,&quot;term&quot;:2,&quot;trait&quot;:0,&quot;legacy&quot;:0,&quot;orderTable&quot;:258,&quot;orderDeck&quot;:48}," calcext:value-type="string">
            <text:p>{"id":"3-30","name":"井原西鶴","kana":"いはらさいかく","traitText":null,"ruleText":"執筆 - ハイケイか「美術」イジンが戦場に置かれたとき、これを寝かせて発動できる。自分の山札の上から1枚を裏のまま魔力ゾーンに置く。","legacyText":null,"imageUrl":"https://one-draw.jp/ijinden/cardlist/003/card/03_030.png","expansion":35,"rarity":1,"type":1,"level":2,"color":4,"term":2,"trait":0,"legacy":0,"orderTable":258,"orderDeck":48},</text:p>
          </table:table-cell>
          <table:table-cell table:number-columns-repeated="16347"/>
        </table:table-row>
        <table:table-row table:style-name="ro2">
          <table:table-cell office:value-type="float" office:value="259" calcext:value-type="float">
            <text:p>259</text:p>
          </table:table-cell>
          <table:table-cell office:value-type="float" office:value="231" calcext:value-type="float">
            <text:p>231</text:p>
          </table:table-cell>
          <table:table-cell office:value-type="string" calcext:value-type="string">
            <text:p>3-31</text:p>
          </table:table-cell>
          <table:table-cell office:value-type="float" office:value="31" calcext:value-type="float">
            <text:p>31</text:p>
          </table:table-cell>
          <table:table-cell office:value-type="string" calcext:value-type="string">
            <text:p>近松門左衛門</text:p>
          </table:table-cell>
          <table:table-cell office:value-type="string" calcext:value-type="string">
            <text:p>ちかまつもんざえもん</text:p>
          </table:table-cell>
          <table:table-cell office:value-type="string" calcext:value-type="string">
            <text:p>第３弾ブースターパック</text:p>
          </table:table-cell>
          <table:table-cell table:formula="of:=VLOOKUP([.G260];[$収録番号.$A$1:$収録番号.$B$9];2;0)" office:value-type="float" office:value="35" calcext:value-type="float">
            <text:p>35</text:p>
          </table:table-cell>
          <table:table-cell office:value-type="string" calcext:value-type="string">
            <text:p>R</text:p>
          </table:table-cell>
          <table:table-cell table:formula="of:=VLOOKUP([.I260];[$レアリティ番号.$A$1:$レアリティ番号.$B$4];2;0)" office:value-type="float" office:value="2" calcext:value-type="float">
            <text:p>2</text:p>
          </table:table-cell>
          <table:table-cell office:value-type="string" calcext:value-type="string">
            <text:p>イジン</text:p>
          </table:table-cell>
          <table:table-cell table:formula="of:=VLOOKUP([.K260];[$種類番号.$A$1:$種類番号.$B$4];2;0)" office:value-type="float" office:value="1" calcext:value-type="float">
            <text:p>1</text:p>
          </table:table-cell>
          <table:table-cell office:value-type="string" calcext:value-type="string">
            <text:p>緑</text:p>
          </table:table-cell>
          <table:table-cell table:formula="of:=VLOOKUP([.M260];[$色番号.$A$1:$色番号.$B$10];2;0)" office:value-type="float" office:value="4" calcext:value-type="float">
            <text:p>4</text:p>
          </table:table-cell>
          <table:table-cell office:value-type="float" office:value="9" calcext:value-type="float">
            <text:p>9</text:p>
          </table:table-cell>
          <table:table-cell table:formula="of:=NA()" office:value-type="string" office:string-value="" calcext:value-type="error">
            <text:p>#N/A</text:p>
          </table:table-cell>
          <table:table-cell office:value-type="string" calcext:value-type="string">
            <text:p>執筆</text:p>
          </table:table-cell>
          <table:table-cell table:formula="of:=IFERROR(VLOOKUP([.$Q260];[$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260];[$特性番号.$A$1:$特性番号.$B$8];2;0);0)" office:value-type="float" office:value="0" calcext:value-type="float">
            <text:p>0</text:p>
          </table:table-cell>
          <table:table-cell office:value-type="string" calcext:value-type="string">
            <text:p>これが戦場にいる間、戦場のハイケイは能力すべてを失う。この能力は能力によって失われない。¶執筆 - ハイケイか緑のイジンが戦場に置かれたとき、これを寝かせて発動できる。自分の戦場のハイケイすべては、このターンに限り「パワー7000」の「イジン」でもある。</text:p>
          </table:table-cell>
          <table:table-cell table:style-name="ce8" table:formula="of:=NA()" office:value-type="string" office:string-value="" calcext:value-type="error">
            <text:p>#N/A</text:p>
          </table:table-cell>
          <table:table-cell table:formula="of:=IFERROR(VLOOKUP([.$V260];[$遺業能力番号.$A$1:$遺業能力番号.$B$9];2;0);0)" office:value-type="float" office:value="0" calcext:value-type="float">
            <text:p>0</text:p>
          </table:table-cell>
          <table:table-cell office:value-type="string" calcext:value-type="string">
            <text:p>https://one-draw.jp/ijinden/cardlist/003/card/03_031.png</text:p>
          </table:table-cell>
          <table:table-cell table:formula="of:=CONCATENATE([$JSON.$A$1];[.$C260];[$JSON.$B$1];[.$E260];[$JSON.$C$1];[.$F260];[$JSON.$D$1];IF(ISNA([.$S260]);&quot;null&quot;;&quot;&quot;&quot;&quot;&amp;[.$S260]&amp;&quot;&quot;&quot;&quot;);[$JSON.$E$1];[.$U260];[$JSON.$F$1];IF(ISNA([.$V260]);&quot;null&quot;;&quot;&quot;&quot;&quot;&amp;[.$V260]&amp;&quot;&quot;&quot;&quot;);[$JSON.$G$1];[.$X260];[$JSON.$H$1];[.$H260];[$JSON.$I$1];[.J260];[$JSON.$J$1];[.$L260];[$JSON.$K$1];[.$O260];[$JSON.$L$1];[.$N260];[$JSON.$M$1];[.$R260];[$JSON.$N$1];[.$T260];[$JSON.$O$1];[.$W260];[$JSON.$P$1];[.$A260];[$JSON.$Q$1];[.$B260];[$JSON.$R$1])" office:value-type="string" office:string-value="{&quot;id&quot;:&quot;3-31&quot;,&quot;name&quot;:&quot;近松門左衛門&quot;,&quot;kana&quot;:&quot;ちかまつもんざえもん&quot;,&quot;traitText&quot;:null,&quot;ruleText&quot;:&quot;これが戦場にいる間、戦場のハイケイは能力すべてを失う。この能力は能力によって失われない。¶執筆 - ハイケイか緑のイジンが戦場に置かれたとき、これを寝かせて発動できる。自分の戦場のハイケイすべては、このターンに限り「パワー7000」の「イジン」でもある。&quot;,&quot;legacyText&quot;:null,&quot;imageUrl&quot;:&quot;https://one-draw.jp/ijinden/cardlist/003/card/03_031.png&quot;,&quot;expansion&quot;:35,&quot;rarity&quot;:2,&quot;type&quot;:1,&quot;level&quot;:9,&quot;color&quot;:4,&quot;term&quot;:2,&quot;trait&quot;:0,&quot;legacy&quot;:0,&quot;orderTable&quot;:259,&quot;orderDeck&quot;:231}," calcext:value-type="string">
            <text:p>{"id":"3-31","name":"近松門左衛門","kana":"ちかまつもんざえもん","traitText":null,"ruleText":"これが戦場にいる間、戦場のハイケイは能力すべてを失う。この能力は能力によって失われない。¶執筆 - ハイケイか緑のイジンが戦場に置かれたとき、これを寝かせて発動できる。自分の戦場のハイケイすべては、このターンに限り「パワー7000」の「イジン」でもある。","legacyText":null,"imageUrl":"https://one-draw.jp/ijinden/cardlist/003/card/03_031.png","expansion":35,"rarity":2,"type":1,"level":9,"color":4,"term":2,"trait":0,"legacy":0,"orderTable":259,"orderDeck":231},</text:p>
          </table:table-cell>
          <table:table-cell table:number-columns-repeated="16347"/>
        </table:table-row>
        <table:table-row table:style-name="ro2">
          <table:table-cell office:value-type="float" office:value="260" calcext:value-type="float">
            <text:p>260</text:p>
          </table:table-cell>
          <table:table-cell office:value-type="float" office:value="14" calcext:value-type="float">
            <text:p>14</text:p>
          </table:table-cell>
          <table:table-cell office:value-type="string" calcext:value-type="string">
            <text:p>3-32</text:p>
          </table:table-cell>
          <table:table-cell office:value-type="float" office:value="32" calcext:value-type="float">
            <text:p>32</text:p>
          </table:table-cell>
          <table:table-cell office:value-type="string" calcext:value-type="string">
            <text:p>田沼意次</text:p>
          </table:table-cell>
          <table:table-cell office:value-type="string" calcext:value-type="string">
            <text:p>たぬまおきつぐ</text:p>
          </table:table-cell>
          <table:table-cell office:value-type="string" calcext:value-type="string">
            <text:p>第３弾ブースターパック</text:p>
          </table:table-cell>
          <table:table-cell table:formula="of:=VLOOKUP([.G261];[$収録番号.$A$1:$収録番号.$B$9];2;0)" office:value-type="float" office:value="35" calcext:value-type="float">
            <text:p>35</text:p>
          </table:table-cell>
          <table:table-cell office:value-type="string" calcext:value-type="string">
            <text:p>N</text:p>
          </table:table-cell>
          <table:table-cell table:formula="of:=VLOOKUP([.I261];[$レアリティ番号.$A$1:$レアリティ番号.$B$4];2;0)" office:value-type="float" office:value="1" calcext:value-type="float">
            <text:p>1</text:p>
          </table:table-cell>
          <table:table-cell office:value-type="string" calcext:value-type="string">
            <text:p>イジン</text:p>
          </table:table-cell>
          <table:table-cell table:formula="of:=VLOOKUP([.K261];[$種類番号.$A$1:$種類番号.$B$4];2;0)" office:value-type="float" office:value="1" calcext:value-type="float">
            <text:p>1</text:p>
          </table:table-cell>
          <table:table-cell office:value-type="string" calcext:value-type="string">
            <text:p>緑</text:p>
          </table:table-cell>
          <table:table-cell table:formula="of:=VLOOKUP([.M261];[$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6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61];[$特性番号.$A$1:$特性番号.$B$8];2;0);0)" office:value-type="float" office:value="0" calcext:value-type="float">
            <text:p>0</text:p>
          </table:table-cell>
          <table:table-cell office:value-type="string" calcext:value-type="string">
            <text:p>パワー3000以上の間「自分のメインフェイズが開始したとき、マリョク配置権+1する」を得る。</text:p>
          </table:table-cell>
          <table:table-cell table:style-name="ce8" table:formula="of:=NA()" office:value-type="string" office:string-value="" calcext:value-type="error">
            <text:p>#N/A</text:p>
          </table:table-cell>
          <table:table-cell table:formula="of:=IFERROR(VLOOKUP([.$V261];[$遺業能力番号.$A$1:$遺業能力番号.$B$9];2;0);0)" office:value-type="float" office:value="0" calcext:value-type="float">
            <text:p>0</text:p>
          </table:table-cell>
          <table:table-cell office:value-type="string" calcext:value-type="string">
            <text:p>https://one-draw.jp/ijinden/cardlist/003/card/03_032.png</text:p>
          </table:table-cell>
          <table:table-cell table:formula="of:=CONCATENATE([$JSON.$A$1];[.$C261];[$JSON.$B$1];[.$E261];[$JSON.$C$1];[.$F261];[$JSON.$D$1];IF(ISNA([.$S261]);&quot;null&quot;;&quot;&quot;&quot;&quot;&amp;[.$S261]&amp;&quot;&quot;&quot;&quot;);[$JSON.$E$1];[.$U261];[$JSON.$F$1];IF(ISNA([.$V261]);&quot;null&quot;;&quot;&quot;&quot;&quot;&amp;[.$V261]&amp;&quot;&quot;&quot;&quot;);[$JSON.$G$1];[.$X261];[$JSON.$H$1];[.$H261];[$JSON.$I$1];[.J261];[$JSON.$J$1];[.$L261];[$JSON.$K$1];[.$O261];[$JSON.$L$1];[.$N261];[$JSON.$M$1];[.$R261];[$JSON.$N$1];[.$T261];[$JSON.$O$1];[.$W261];[$JSON.$P$1];[.$A261];[$JSON.$Q$1];[.$B261];[$JSON.$R$1])" office:value-type="string" office:string-value="{&quot;id&quot;:&quot;3-32&quot;,&quot;name&quot;:&quot;田沼意次&quot;,&quot;kana&quot;:&quot;たぬまおきつぐ&quot;,&quot;traitText&quot;:null,&quot;ruleText&quot;:&quot;パワー3000以上の間「自分のメインフェイズが開始したとき、マリョク配置権+1する」を得る。&quot;,&quot;legacyText&quot;:null,&quot;imageUrl&quot;:&quot;https://one-draw.jp/ijinden/cardlist/003/card/03_032.png&quot;,&quot;expansion&quot;:35,&quot;rarity&quot;:1,&quot;type&quot;:1,&quot;level&quot;:1,&quot;color&quot;:4,&quot;term&quot;:0,&quot;trait&quot;:0,&quot;legacy&quot;:0,&quot;orderTable&quot;:260,&quot;orderDeck&quot;:14}," calcext:value-type="string">
            <text:p>{"id":"3-32","name":"田沼意次","kana":"たぬまおきつぐ","traitText":null,"ruleText":"パワー3000以上の間「自分のメインフェイズが開始したとき、マリョク配置権+1する」を得る。","legacyText":null,"imageUrl":"https://one-draw.jp/ijinden/cardlist/003/card/03_032.png","expansion":35,"rarity":1,"type":1,"level":1,"color":4,"term":0,"trait":0,"legacy":0,"orderTable":260,"orderDeck":14},</text:p>
          </table:table-cell>
          <table:table-cell table:number-columns-repeated="16347"/>
        </table:table-row>
        <table:table-row table:style-name="ro2">
          <table:table-cell office:value-type="float" office:value="261" calcext:value-type="float">
            <text:p>261</text:p>
          </table:table-cell>
          <table:table-cell office:value-type="float" office:value="49" calcext:value-type="float">
            <text:p>49</text:p>
          </table:table-cell>
          <table:table-cell office:value-type="string" calcext:value-type="string">
            <text:p>3-33</text:p>
          </table:table-cell>
          <table:table-cell office:value-type="float" office:value="33" calcext:value-type="float">
            <text:p>33</text:p>
          </table:table-cell>
          <table:table-cell office:value-type="string" calcext:value-type="string">
            <text:p>高野長英</text:p>
          </table:table-cell>
          <table:table-cell office:value-type="string" calcext:value-type="string">
            <text:p>たかのちょうえい</text:p>
          </table:table-cell>
          <table:table-cell office:value-type="string" calcext:value-type="string">
            <text:p>第３弾ブースターパック</text:p>
          </table:table-cell>
          <table:table-cell table:formula="of:=VLOOKUP([.G262];[$収録番号.$A$1:$収録番号.$B$9];2;0)" office:value-type="float" office:value="35" calcext:value-type="float">
            <text:p>35</text:p>
          </table:table-cell>
          <table:table-cell office:value-type="string" calcext:value-type="string">
            <text:p>N</text:p>
          </table:table-cell>
          <table:table-cell table:formula="of:=VLOOKUP([.I262];[$レアリティ番号.$A$1:$レアリティ番号.$B$4];2;0)" office:value-type="float" office:value="1" calcext:value-type="float">
            <text:p>1</text:p>
          </table:table-cell>
          <table:table-cell office:value-type="string" calcext:value-type="string">
            <text:p>イジン</text:p>
          </table:table-cell>
          <table:table-cell table:formula="of:=VLOOKUP([.K262];[$種類番号.$A$1:$種類番号.$B$4];2;0)" office:value-type="float" office:value="1" calcext:value-type="float">
            <text:p>1</text:p>
          </table:table-cell>
          <table:table-cell office:value-type="string" calcext:value-type="string">
            <text:p>緑</text:p>
          </table:table-cell>
          <table:table-cell table:formula="of:=VLOOKUP([.M262];[$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62];[$能力語番号.$A$1:$能力語番号.$B$10];2;0);0)" office:value-type="float" office:value="0" calcext:value-type="float">
            <text:p>0</text:p>
          </table:table-cell>
          <table:table-cell office:value-type="string" calcext:value-type="string">
            <text:p>医術</text:p>
          </table:table-cell>
          <table:table-cell table:formula="of:=IFERROR(VLOOKUP([.$S262];[$特性番号.$A$1:$特性番号.$B$8];2;0);0)" office:value-type="float" office:value="16" calcext:value-type="float">
            <text:p>16</text:p>
          </table:table-cell>
          <table:table-cell office:value-type="string" calcext:value-type="string">
            <text:p>相手のターンのブロックステップが開始したとき、自分の魔力ゾーンのカード1つを墓地に置いて発動できる。自分の戦場のカードすべてを起こす。</text:p>
          </table:table-cell>
          <table:table-cell table:style-name="ce8" office:value-type="string" calcext:value-type="string">
            <text:p>1ドローする</text:p>
          </table:table-cell>
          <table:table-cell table:formula="of:=IFERROR(VLOOKUP([.$V262];[$遺業能力番号.$A$1:$遺業能力番号.$B$9];2;0);0)" office:value-type="float" office:value="4" calcext:value-type="float">
            <text:p>4</text:p>
          </table:table-cell>
          <table:table-cell office:value-type="string" calcext:value-type="string">
            <text:p>https://one-draw.jp/ijinden/cardlist/003/card/03_033.png</text:p>
          </table:table-cell>
          <table:table-cell table:formula="of:=CONCATENATE([$JSON.$A$1];[.$C262];[$JSON.$B$1];[.$E262];[$JSON.$C$1];[.$F262];[$JSON.$D$1];IF(ISNA([.$S262]);&quot;null&quot;;&quot;&quot;&quot;&quot;&amp;[.$S262]&amp;&quot;&quot;&quot;&quot;);[$JSON.$E$1];[.$U262];[$JSON.$F$1];IF(ISNA([.$V262]);&quot;null&quot;;&quot;&quot;&quot;&quot;&amp;[.$V262]&amp;&quot;&quot;&quot;&quot;);[$JSON.$G$1];[.$X262];[$JSON.$H$1];[.$H262];[$JSON.$I$1];[.J262];[$JSON.$J$1];[.$L262];[$JSON.$K$1];[.$O262];[$JSON.$L$1];[.$N262];[$JSON.$M$1];[.$R262];[$JSON.$N$1];[.$T262];[$JSON.$O$1];[.$W262];[$JSON.$P$1];[.$A262];[$JSON.$Q$1];[.$B262];[$JSON.$R$1])" office:value-type="string" office:string-value="{&quot;id&quot;:&quot;3-33&quot;,&quot;name&quot;:&quot;高野長英&quot;,&quot;kana&quot;:&quot;たかのちょうえい&quot;,&quot;traitText&quot;:&quot;医術&quot;,&quot;ruleText&quot;:&quot;相手のターンのブロックステップが開始したとき、自分の魔力ゾーンのカード1つを墓地に置いて発動できる。自分の戦場のカードすべてを起こす。&quot;,&quot;legacyText&quot;:&quot;1ドローする&quot;,&quot;imageUrl&quot;:&quot;https://one-draw.jp/ijinden/cardlist/003/card/03_033.png&quot;,&quot;expansion&quot;:35,&quot;rarity&quot;:1,&quot;type&quot;:1,&quot;level&quot;:2,&quot;color&quot;:4,&quot;term&quot;:0,&quot;trait&quot;:16,&quot;legacy&quot;:4,&quot;orderTable&quot;:261,&quot;orderDeck&quot;:49}," calcext:value-type="string">
            <text:p>{"id":"3-33","name":"高野長英","kana":"たかのちょうえい","traitText":"医術","ruleText":"相手のターンのブロックステップが開始したとき、自分の魔力ゾーンのカード1つを墓地に置いて発動できる。自分の戦場のカードすべてを起こす。","legacyText":"1ドローする","imageUrl":"https://one-draw.jp/ijinden/cardlist/003/card/03_033.png","expansion":35,"rarity":1,"type":1,"level":2,"color":4,"term":0,"trait":16,"legacy":4,"orderTable":261,"orderDeck":49},</text:p>
          </table:table-cell>
          <table:table-cell table:number-columns-repeated="16347"/>
        </table:table-row>
        <table:table-row table:style-name="ro2">
          <table:table-cell office:value-type="float" office:value="262" calcext:value-type="float">
            <text:p>262</text:p>
          </table:table-cell>
          <table:table-cell office:value-type="float" office:value="195" calcext:value-type="float">
            <text:p>195</text:p>
          </table:table-cell>
          <table:table-cell office:value-type="string" calcext:value-type="string">
            <text:p>3-34</text:p>
          </table:table-cell>
          <table:table-cell office:value-type="float" office:value="34" calcext:value-type="float">
            <text:p>34</text:p>
          </table:table-cell>
          <table:table-cell office:value-type="string" calcext:value-type="string">
            <text:p>菱川師宣</text:p>
          </table:table-cell>
          <table:table-cell office:value-type="string" calcext:value-type="string">
            <text:p>ひしかわもろのぶ</text:p>
          </table:table-cell>
          <table:table-cell office:value-type="string" calcext:value-type="string">
            <text:p>第３弾ブースターパック</text:p>
          </table:table-cell>
          <table:table-cell table:formula="of:=VLOOKUP([.G263];[$収録番号.$A$1:$収録番号.$B$9];2;0)" office:value-type="float" office:value="35" calcext:value-type="float">
            <text:p>35</text:p>
          </table:table-cell>
          <table:table-cell office:value-type="string" calcext:value-type="string">
            <text:p>N</text:p>
          </table:table-cell>
          <table:table-cell table:formula="of:=VLOOKUP([.I263];[$レアリティ番号.$A$1:$レアリティ番号.$B$4];2;0)" office:value-type="float" office:value="1" calcext:value-type="float">
            <text:p>1</text:p>
          </table:table-cell>
          <table:table-cell office:value-type="string" calcext:value-type="string">
            <text:p>イジン</text:p>
          </table:table-cell>
          <table:table-cell table:formula="of:=VLOOKUP([.K263];[$種類番号.$A$1:$種類番号.$B$4];2;0)" office:value-type="float" office:value="1" calcext:value-type="float">
            <text:p>1</text:p>
          </table:table-cell>
          <table:table-cell office:value-type="string" calcext:value-type="string">
            <text:p>緑</text:p>
          </table:table-cell>
          <table:table-cell table:formula="of:=VLOOKUP([.M263];[$色番号.$A$1:$色番号.$B$10];2;0)" office:value-type="float" office:value="4" calcext:value-type="float">
            <text:p>4</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63];[$能力語番号.$A$1:$能力語番号.$B$10];2;0);0)" office:value-type="float" office:value="0" calcext:value-type="float">
            <text:p>0</text:p>
          </table:table-cell>
          <table:table-cell office:value-type="string" calcext:value-type="string">
            <text:p>美術</text:p>
          </table:table-cell>
          <table:table-cell table:formula="of:=IFERROR(VLOOKUP([.$S263];[$特性番号.$A$1:$特性番号.$B$8];2;0);0)" office:value-type="float" office:value="2" calcext:value-type="float">
            <text:p>2</text:p>
          </table:table-cell>
          <table:table-cell office:value-type="string" calcext:value-type="string">
            <text:p>「執筆」を持つイジンが自分の戦場に置かれたとき、これを寝かせて発動できる。イジン召喚権+1する。</text:p>
          </table:table-cell>
          <table:table-cell table:style-name="ce8" office:value-type="string" calcext:value-type="string">
            <text:p>魔力化</text:p>
          </table:table-cell>
          <table:table-cell table:formula="of:=IFERROR(VLOOKUP([.$V263];[$遺業能力番号.$A$1:$遺業能力番号.$B$9];2;0);0)" office:value-type="float" office:value="1" calcext:value-type="float">
            <text:p>1</text:p>
          </table:table-cell>
          <table:table-cell office:value-type="string" calcext:value-type="string">
            <text:p>https://one-draw.jp/ijinden/cardlist/003/card/03_034.png</text:p>
          </table:table-cell>
          <table:table-cell table:formula="of:=CONCATENATE([$JSON.$A$1];[.$C263];[$JSON.$B$1];[.$E263];[$JSON.$C$1];[.$F263];[$JSON.$D$1];IF(ISNA([.$S263]);&quot;null&quot;;&quot;&quot;&quot;&quot;&amp;[.$S263]&amp;&quot;&quot;&quot;&quot;);[$JSON.$E$1];[.$U263];[$JSON.$F$1];IF(ISNA([.$V263]);&quot;null&quot;;&quot;&quot;&quot;&quot;&amp;[.$V263]&amp;&quot;&quot;&quot;&quot;);[$JSON.$G$1];[.$X263];[$JSON.$H$1];[.$H263];[$JSON.$I$1];[.J263];[$JSON.$J$1];[.$L263];[$JSON.$K$1];[.$O263];[$JSON.$L$1];[.$N263];[$JSON.$M$1];[.$R263];[$JSON.$N$1];[.$T263];[$JSON.$O$1];[.$W263];[$JSON.$P$1];[.$A263];[$JSON.$Q$1];[.$B263];[$JSON.$R$1])" office:value-type="string" office:string-value="{&quot;id&quot;:&quot;3-34&quot;,&quot;name&quot;:&quot;菱川師宣&quot;,&quot;kana&quot;:&quot;ひしかわもろのぶ&quot;,&quot;traitText&quot;:&quot;美術&quot;,&quot;ruleText&quot;:&quot;「執筆」を持つイジンが自分の戦場に置かれたとき、これを寝かせて発動できる。イジン召喚権+1する。&quot;,&quot;legacyText&quot;:&quot;魔力化&quot;,&quot;imageUrl&quot;:&quot;https://one-draw.jp/ijinden/cardlist/003/card/03_034.png&quot;,&quot;expansion&quot;:35,&quot;rarity&quot;:1,&quot;type&quot;:1,&quot;level&quot;:6,&quot;color&quot;:4,&quot;term&quot;:0,&quot;trait&quot;:2,&quot;legacy&quot;:1,&quot;orderTable&quot;:262,&quot;orderDeck&quot;:195}," calcext:value-type="string">
            <text:p>{"id":"3-34","name":"菱川師宣","kana":"ひしかわもろのぶ","traitText":"美術","ruleText":"「執筆」を持つイジンが自分の戦場に置かれたとき、これを寝かせて発動できる。イジン召喚権+1する。","legacyText":"魔力化","imageUrl":"https://one-draw.jp/ijinden/cardlist/003/card/03_034.png","expansion":35,"rarity":1,"type":1,"level":6,"color":4,"term":0,"trait":2,"legacy":1,"orderTable":262,"orderDeck":195},</text:p>
          </table:table-cell>
          <table:table-cell table:number-columns-repeated="16347"/>
        </table:table-row>
        <table:table-row table:style-name="ro2">
          <table:table-cell office:value-type="float" office:value="263" calcext:value-type="float">
            <text:p>263</text:p>
          </table:table-cell>
          <table:table-cell office:value-type="float" office:value="175" calcext:value-type="float">
            <text:p>175</text:p>
          </table:table-cell>
          <table:table-cell office:value-type="string" calcext:value-type="string">
            <text:p>3-35</text:p>
          </table:table-cell>
          <table:table-cell office:value-type="float" office:value="35" calcext:value-type="float">
            <text:p>35</text:p>
          </table:table-cell>
          <table:table-cell office:value-type="string" calcext:value-type="string">
            <text:p>徳川吉宗</text:p>
          </table:table-cell>
          <table:table-cell office:value-type="string" calcext:value-type="string">
            <text:p>とくがわよしむね</text:p>
          </table:table-cell>
          <table:table-cell office:value-type="string" calcext:value-type="string">
            <text:p>第３弾ブースターパック</text:p>
          </table:table-cell>
          <table:table-cell table:formula="of:=VLOOKUP([.G264];[$収録番号.$A$1:$収録番号.$B$9];2;0)" office:value-type="float" office:value="35" calcext:value-type="float">
            <text:p>35</text:p>
          </table:table-cell>
          <table:table-cell office:value-type="string" calcext:value-type="string">
            <text:p>R</text:p>
          </table:table-cell>
          <table:table-cell table:formula="of:=VLOOKUP([.I264];[$レアリティ番号.$A$1:$レアリティ番号.$B$4];2;0)" office:value-type="float" office:value="2" calcext:value-type="float">
            <text:p>2</text:p>
          </table:table-cell>
          <table:table-cell office:value-type="string" calcext:value-type="string">
            <text:p>イジン</text:p>
          </table:table-cell>
          <table:table-cell table:formula="of:=VLOOKUP([.K264];[$種類番号.$A$1:$種類番号.$B$4];2;0)" office:value-type="float" office:value="1" calcext:value-type="float">
            <text:p>1</text:p>
          </table:table-cell>
          <table:table-cell office:value-type="string" calcext:value-type="string">
            <text:p>黄</text:p>
          </table:table-cell>
          <table:table-cell table:formula="of:=VLOOKUP([.M264];[$色番号.$A$1:$色番号.$B$10];2;0)" office:value-type="float" office:value="8" calcext:value-type="float">
            <text:p>8</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6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64];[$特性番号.$A$1:$特性番号.$B$8];2;0);0)" office:value-type="float" office:value="0" calcext:value-type="float">
            <text:p>0</text:p>
          </table:table-cell>
          <table:table-cell office:value-type="string" calcext:value-type="string">
            <text:p>スタンド¶戦場に置かれたとき、戦場のハイケイ1つか、装備されているカード1つを指定して発動できる。それを山札の下に戻す。¶自分のエンドフェイズが開始したとき、これを山札の下に戻す。</text:p>
          </table:table-cell>
          <table:table-cell table:style-name="ce8" office:value-type="string" calcext:value-type="string">
            <text:p>反魂</text:p>
          </table:table-cell>
          <table:table-cell table:formula="of:=IFERROR(VLOOKUP([.$V264];[$遺業能力番号.$A$1:$遺業能力番号.$B$9];2;0);0)" office:value-type="float" office:value="6" calcext:value-type="float">
            <text:p>6</text:p>
          </table:table-cell>
          <table:table-cell office:value-type="string" calcext:value-type="string">
            <text:p>https://one-draw.jp/ijinden/cardlist/003/card/03_035.png</text:p>
          </table:table-cell>
          <table:table-cell table:formula="of:=CONCATENATE([$JSON.$A$1];[.$C264];[$JSON.$B$1];[.$E264];[$JSON.$C$1];[.$F264];[$JSON.$D$1];IF(ISNA([.$S264]);&quot;null&quot;;&quot;&quot;&quot;&quot;&amp;[.$S264]&amp;&quot;&quot;&quot;&quot;);[$JSON.$E$1];[.$U264];[$JSON.$F$1];IF(ISNA([.$V264]);&quot;null&quot;;&quot;&quot;&quot;&quot;&amp;[.$V264]&amp;&quot;&quot;&quot;&quot;);[$JSON.$G$1];[.$X264];[$JSON.$H$1];[.$H264];[$JSON.$I$1];[.J264];[$JSON.$J$1];[.$L264];[$JSON.$K$1];[.$O264];[$JSON.$L$1];[.$N264];[$JSON.$M$1];[.$R264];[$JSON.$N$1];[.$T264];[$JSON.$O$1];[.$W264];[$JSON.$P$1];[.$A264];[$JSON.$Q$1];[.$B264];[$JSON.$R$1])" office:value-type="string" office:string-value="{&quot;id&quot;:&quot;3-35&quot;,&quot;name&quot;:&quot;徳川吉宗&quot;,&quot;kana&quot;:&quot;とくがわよしむね&quot;,&quot;traitText&quot;:null,&quot;ruleText&quot;:&quot;スタンド¶戦場に置かれたとき、戦場のハイケイ1つか、装備されているカード1つを指定して発動できる。それを山札の下に戻す。¶自分のエンドフェイズが開始したとき、これを山札の下に戻す。&quot;,&quot;legacyText&quot;:&quot;反魂&quot;,&quot;imageUrl&quot;:&quot;https://one-draw.jp/ijinden/cardlist/003/card/03_035.png&quot;,&quot;expansion&quot;:35,&quot;rarity&quot;:2,&quot;type&quot;:1,&quot;level&quot;:5,&quot;color&quot;:8,&quot;term&quot;:0,&quot;trait&quot;:0,&quot;legacy&quot;:6,&quot;orderTable&quot;:263,&quot;orderDeck&quot;:175}," calcext:value-type="string">
            <text:p>{"id":"3-35","name":"徳川吉宗","kana":"とくがわよしむね","traitText":null,"ruleText":"スタンド¶戦場に置かれたとき、戦場のハイケイ1つか、装備されているカード1つを指定して発動できる。それを山札の下に戻す。¶自分のエンドフェイズが開始したとき、これを山札の下に戻す。","legacyText":"反魂","imageUrl":"https://one-draw.jp/ijinden/cardlist/003/card/03_035.png","expansion":35,"rarity":2,"type":1,"level":5,"color":8,"term":0,"trait":0,"legacy":6,"orderTable":263,"orderDeck":175},</text:p>
          </table:table-cell>
          <table:table-cell table:number-columns-repeated="16347"/>
        </table:table-row>
        <table:table-row table:style-name="ro2">
          <table:table-cell office:value-type="float" office:value="264" calcext:value-type="float">
            <text:p>264</text:p>
          </table:table-cell>
          <table:table-cell office:value-type="float" office:value="19" calcext:value-type="float">
            <text:p>19</text:p>
          </table:table-cell>
          <table:table-cell office:value-type="string" calcext:value-type="string">
            <text:p>3-36</text:p>
          </table:table-cell>
          <table:table-cell office:value-type="float" office:value="36" calcext:value-type="float">
            <text:p>36</text:p>
          </table:table-cell>
          <table:table-cell office:value-type="string" calcext:value-type="string">
            <text:p>雪舟</text:p>
          </table:table-cell>
          <table:table-cell office:value-type="string" calcext:value-type="string">
            <text:p>せっしゅう</text:p>
          </table:table-cell>
          <table:table-cell office:value-type="string" calcext:value-type="string">
            <text:p>第３弾ブースターパック</text:p>
          </table:table-cell>
          <table:table-cell table:formula="of:=VLOOKUP([.G265];[$収録番号.$A$1:$収録番号.$B$9];2;0)" office:value-type="float" office:value="35" calcext:value-type="float">
            <text:p>35</text:p>
          </table:table-cell>
          <table:table-cell office:value-type="string" calcext:value-type="string">
            <text:p>N</text:p>
          </table:table-cell>
          <table:table-cell table:formula="of:=VLOOKUP([.I265];[$レアリティ番号.$A$1:$レアリティ番号.$B$4];2;0)" office:value-type="float" office:value="1" calcext:value-type="float">
            <text:p>1</text:p>
          </table:table-cell>
          <table:table-cell office:value-type="string" calcext:value-type="string">
            <text:p>イジン</text:p>
          </table:table-cell>
          <table:table-cell table:formula="of:=VLOOKUP([.K265];[$種類番号.$A$1:$種類番号.$B$4];2;0)" office:value-type="float" office:value="1" calcext:value-type="float">
            <text:p>1</text:p>
          </table:table-cell>
          <table:table-cell office:value-type="string" calcext:value-type="string">
            <text:p>黄</text:p>
          </table:table-cell>
          <table:table-cell table:formula="of:=VLOOKUP([.M265];[$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65];[$能力語番号.$A$1:$能力語番号.$B$10];2;0);0)" office:value-type="float" office:value="0" calcext:value-type="float">
            <text:p>0</text:p>
          </table:table-cell>
          <table:table-cell office:value-type="string" calcext:value-type="string">
            <text:p>美術</text:p>
          </table:table-cell>
          <table:table-cell table:formula="of:=IFERROR(VLOOKUP([.$S265];[$特性番号.$A$1:$特性番号.$B$8];2;0);0)" office:value-type="float" office:value="2" calcext:value-type="float">
            <text:p>2</text:p>
          </table:table-cell>
          <table:table-cell office:value-type="string" calcext:value-type="string">
            <text:p>戦場に置かれたとき、自分の手札1枚を山札の下に戻して、1ドローする。</text:p>
          </table:table-cell>
          <table:table-cell table:style-name="ce8" office:value-type="string" calcext:value-type="string">
            <text:p>1ドローする</text:p>
          </table:table-cell>
          <table:table-cell table:formula="of:=IFERROR(VLOOKUP([.$V265];[$遺業能力番号.$A$1:$遺業能力番号.$B$9];2;0);0)" office:value-type="float" office:value="4" calcext:value-type="float">
            <text:p>4</text:p>
          </table:table-cell>
          <table:table-cell office:value-type="string" calcext:value-type="string">
            <text:p>https://one-draw.jp/ijinden/cardlist/003/card/03_036.png</text:p>
          </table:table-cell>
          <table:table-cell table:formula="of:=CONCATENATE([$JSON.$A$1];[.$C265];[$JSON.$B$1];[.$E265];[$JSON.$C$1];[.$F265];[$JSON.$D$1];IF(ISNA([.$S265]);&quot;null&quot;;&quot;&quot;&quot;&quot;&amp;[.$S265]&amp;&quot;&quot;&quot;&quot;);[$JSON.$E$1];[.$U265];[$JSON.$F$1];IF(ISNA([.$V265]);&quot;null&quot;;&quot;&quot;&quot;&quot;&amp;[.$V265]&amp;&quot;&quot;&quot;&quot;);[$JSON.$G$1];[.$X265];[$JSON.$H$1];[.$H265];[$JSON.$I$1];[.J265];[$JSON.$J$1];[.$L265];[$JSON.$K$1];[.$O265];[$JSON.$L$1];[.$N265];[$JSON.$M$1];[.$R265];[$JSON.$N$1];[.$T265];[$JSON.$O$1];[.$W265];[$JSON.$P$1];[.$A265];[$JSON.$Q$1];[.$B265];[$JSON.$R$1])" office:value-type="string" office:string-value="{&quot;id&quot;:&quot;3-36&quot;,&quot;name&quot;:&quot;雪舟&quot;,&quot;kana&quot;:&quot;せっしゅう&quot;,&quot;traitText&quot;:&quot;美術&quot;,&quot;ruleText&quot;:&quot;戦場に置かれたとき、自分の手札1枚を山札の下に戻して、1ドローする。&quot;,&quot;legacyText&quot;:&quot;1ドローする&quot;,&quot;imageUrl&quot;:&quot;https://one-draw.jp/ijinden/cardlist/003/card/03_036.png&quot;,&quot;expansion&quot;:35,&quot;rarity&quot;:1,&quot;type&quot;:1,&quot;level&quot;:1,&quot;color&quot;:8,&quot;term&quot;:0,&quot;trait&quot;:2,&quot;legacy&quot;:4,&quot;orderTable&quot;:264,&quot;orderDeck&quot;:19}," calcext:value-type="string">
            <text:p>{"id":"3-36","name":"雪舟","kana":"せっしゅう","traitText":"美術","ruleText":"戦場に置かれたとき、自分の手札1枚を山札の下に戻して、1ドローする。","legacyText":"1ドローする","imageUrl":"https://one-draw.jp/ijinden/cardlist/003/card/03_036.png","expansion":35,"rarity":1,"type":1,"level":1,"color":8,"term":0,"trait":2,"legacy":4,"orderTable":264,"orderDeck":19},</text:p>
          </table:table-cell>
          <table:table-cell table:number-columns-repeated="16347"/>
        </table:table-row>
        <table:table-row table:style-name="ro2">
          <table:table-cell office:value-type="float" office:value="265" calcext:value-type="float">
            <text:p>265</text:p>
          </table:table-cell>
          <table:table-cell office:value-type="float" office:value="198" calcext:value-type="float">
            <text:p>198</text:p>
          </table:table-cell>
          <table:table-cell office:value-type="string" calcext:value-type="string">
            <text:p>3-37</text:p>
          </table:table-cell>
          <table:table-cell office:value-type="float" office:value="37" calcext:value-type="float">
            <text:p>37</text:p>
          </table:table-cell>
          <table:table-cell office:value-type="string" calcext:value-type="string">
            <text:p>俵屋宗達</text:p>
          </table:table-cell>
          <table:table-cell office:value-type="string" calcext:value-type="string">
            <text:p>たわらやそうたつ</text:p>
          </table:table-cell>
          <table:table-cell office:value-type="string" calcext:value-type="string">
            <text:p>第３弾ブースターパック</text:p>
          </table:table-cell>
          <table:table-cell table:formula="of:=VLOOKUP([.G266];[$収録番号.$A$1:$収録番号.$B$9];2;0)" office:value-type="float" office:value="35" calcext:value-type="float">
            <text:p>35</text:p>
          </table:table-cell>
          <table:table-cell office:value-type="string" calcext:value-type="string">
            <text:p>N</text:p>
          </table:table-cell>
          <table:table-cell table:formula="of:=VLOOKUP([.I266];[$レアリティ番号.$A$1:$レアリティ番号.$B$4];2;0)" office:value-type="float" office:value="1" calcext:value-type="float">
            <text:p>1</text:p>
          </table:table-cell>
          <table:table-cell office:value-type="string" calcext:value-type="string">
            <text:p>イジン</text:p>
          </table:table-cell>
          <table:table-cell table:formula="of:=VLOOKUP([.K266];[$種類番号.$A$1:$種類番号.$B$4];2;0)" office:value-type="float" office:value="1" calcext:value-type="float">
            <text:p>1</text:p>
          </table:table-cell>
          <table:table-cell office:value-type="string" calcext:value-type="string">
            <text:p>黄</text:p>
          </table:table-cell>
          <table:table-cell table:formula="of:=VLOOKUP([.M266];[$色番号.$A$1:$色番号.$B$10];2;0)" office:value-type="float" office:value="8" calcext:value-type="float">
            <text:p>8</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66];[$能力語番号.$A$1:$能力語番号.$B$10];2;0);0)" office:value-type="float" office:value="0" calcext:value-type="float">
            <text:p>0</text:p>
          </table:table-cell>
          <table:table-cell office:value-type="string" calcext:value-type="string">
            <text:p>美術</text:p>
          </table:table-cell>
          <table:table-cell table:formula="of:=IFERROR(VLOOKUP([.$S266];[$特性番号.$A$1:$特性番号.$B$8];2;0);0)" office:value-type="float" office:value="2" calcext:value-type="float">
            <text:p>2</text:p>
          </table:table-cell>
          <table:table-cell office:value-type="string" calcext:value-type="string">
            <text:p>これが戦場にいる間、自分の戦場のハイケイは「特性：美術」を得る。¶戦場に置かれたとき、戦場の「美術」ハイケイ1つを山札の上に戻して発動できる。イジン召喚権+1する。</text:p>
          </table:table-cell>
          <table:table-cell table:style-name="ce8" table:formula="of:=NA()" office:value-type="string" office:string-value="" calcext:value-type="error">
            <text:p>#N/A</text:p>
          </table:table-cell>
          <table:table-cell table:formula="of:=IFERROR(VLOOKUP([.$V266];[$遺業能力番号.$A$1:$遺業能力番号.$B$9];2;0);0)" office:value-type="float" office:value="0" calcext:value-type="float">
            <text:p>0</text:p>
          </table:table-cell>
          <table:table-cell office:value-type="string" calcext:value-type="string">
            <text:p>https://one-draw.jp/ijinden/cardlist/003/card/03_037.png</text:p>
          </table:table-cell>
          <table:table-cell table:formula="of:=CONCATENATE([$JSON.$A$1];[.$C266];[$JSON.$B$1];[.$E266];[$JSON.$C$1];[.$F266];[$JSON.$D$1];IF(ISNA([.$S266]);&quot;null&quot;;&quot;&quot;&quot;&quot;&amp;[.$S266]&amp;&quot;&quot;&quot;&quot;);[$JSON.$E$1];[.$U266];[$JSON.$F$1];IF(ISNA([.$V266]);&quot;null&quot;;&quot;&quot;&quot;&quot;&amp;[.$V266]&amp;&quot;&quot;&quot;&quot;);[$JSON.$G$1];[.$X266];[$JSON.$H$1];[.$H266];[$JSON.$I$1];[.J266];[$JSON.$J$1];[.$L266];[$JSON.$K$1];[.$O266];[$JSON.$L$1];[.$N266];[$JSON.$M$1];[.$R266];[$JSON.$N$1];[.$T266];[$JSON.$O$1];[.$W266];[$JSON.$P$1];[.$A266];[$JSON.$Q$1];[.$B266];[$JSON.$R$1])" office:value-type="string" office:string-value="{&quot;id&quot;:&quot;3-37&quot;,&quot;name&quot;:&quot;俵屋宗達&quot;,&quot;kana&quot;:&quot;たわらやそうたつ&quot;,&quot;traitText&quot;:&quot;美術&quot;,&quot;ruleText&quot;:&quot;これが戦場にいる間、自分の戦場のハイケイは「特性：美術」を得る。¶戦場に置かれたとき、戦場の「美術」ハイケイ1つを山札の上に戻して発動できる。イジン召喚権+1する。&quot;,&quot;legacyText&quot;:null,&quot;imageUrl&quot;:&quot;https://one-draw.jp/ijinden/cardlist/003/card/03_037.png&quot;,&quot;expansion&quot;:35,&quot;rarity&quot;:1,&quot;type&quot;:1,&quot;level&quot;:6,&quot;color&quot;:8,&quot;term&quot;:0,&quot;trait&quot;:2,&quot;legacy&quot;:0,&quot;orderTable&quot;:265,&quot;orderDeck&quot;:198}," calcext:value-type="string">
            <text:p>{"id":"3-37","name":"俵屋宗達","kana":"たわらやそうたつ","traitText":"美術","ruleText":"これが戦場にいる間、自分の戦場のハイケイは「特性：美術」を得る。¶戦場に置かれたとき、戦場の「美術」ハイケイ1つを山札の上に戻して発動できる。イジン召喚権+1する。","legacyText":null,"imageUrl":"https://one-draw.jp/ijinden/cardlist/003/card/03_037.png","expansion":35,"rarity":1,"type":1,"level":6,"color":8,"term":0,"trait":2,"legacy":0,"orderTable":265,"orderDeck":198},</text:p>
          </table:table-cell>
          <table:table-cell table:number-columns-repeated="16347"/>
        </table:table-row>
        <table:table-row table:style-name="ro2">
          <table:table-cell office:value-type="float" office:value="266" calcext:value-type="float">
            <text:p>266</text:p>
          </table:table-cell>
          <table:table-cell office:value-type="float" office:value="233" calcext:value-type="float">
            <text:p>233</text:p>
          </table:table-cell>
          <table:table-cell office:value-type="string" calcext:value-type="string">
            <text:p>3-38</text:p>
          </table:table-cell>
          <table:table-cell office:value-type="float" office:value="38" calcext:value-type="float">
            <text:p>38</text:p>
          </table:table-cell>
          <table:table-cell office:value-type="string" calcext:value-type="string">
            <text:p>司馬炎</text:p>
          </table:table-cell>
          <table:table-cell office:value-type="string" calcext:value-type="string">
            <text:p>しばえん</text:p>
          </table:table-cell>
          <table:table-cell office:value-type="string" calcext:value-type="string">
            <text:p>第３弾ブースターパック</text:p>
          </table:table-cell>
          <table:table-cell table:formula="of:=VLOOKUP([.G267];[$収録番号.$A$1:$収録番号.$B$9];2;0)" office:value-type="float" office:value="35" calcext:value-type="float">
            <text:p>35</text:p>
          </table:table-cell>
          <table:table-cell office:value-type="string" calcext:value-type="string">
            <text:p>N</text:p>
          </table:table-cell>
          <table:table-cell table:formula="of:=VLOOKUP([.I267];[$レアリティ番号.$A$1:$レアリティ番号.$B$4];2;0)" office:value-type="float" office:value="1" calcext:value-type="float">
            <text:p>1</text:p>
          </table:table-cell>
          <table:table-cell office:value-type="string" calcext:value-type="string">
            <text:p>イジン</text:p>
          </table:table-cell>
          <table:table-cell table:formula="of:=VLOOKUP([.K267];[$種類番号.$A$1:$種類番号.$B$4];2;0)" office:value-type="float" office:value="1" calcext:value-type="float">
            <text:p>1</text:p>
          </table:table-cell>
          <table:table-cell office:value-type="string" calcext:value-type="string">
            <text:p>黄</text:p>
          </table:table-cell>
          <table:table-cell table:formula="of:=VLOOKUP([.M267];[$色番号.$A$1:$色番号.$B$10];2;0)" office:value-type="float" office:value="8" calcext:value-type="float">
            <text:p>8</text:p>
          </table:table-cell>
          <table:table-cell office:value-type="float" office:value="9" calcext:value-type="float">
            <text:p>9</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6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67];[$特性番号.$A$1:$特性番号.$B$8];2;0);0)" office:value-type="float" office:value="0" calcext:value-type="float">
            <text:p>0</text:p>
          </table:table-cell>
          <table:table-cell office:value-type="string" calcext:value-type="string">
            <text:p>戦場に置かれたとき、自分の戦場のガーディアン1体につき、戦場のイジン1体を山札の下に戻す。</text:p>
          </table:table-cell>
          <table:table-cell table:style-name="ce8" office:value-type="string" calcext:value-type="string">
            <text:p>反魂</text:p>
          </table:table-cell>
          <table:table-cell table:formula="of:=IFERROR(VLOOKUP([.$V267];[$遺業能力番号.$A$1:$遺業能力番号.$B$9];2;0);0)" office:value-type="float" office:value="6" calcext:value-type="float">
            <text:p>6</text:p>
          </table:table-cell>
          <table:table-cell office:value-type="string" calcext:value-type="string">
            <text:p>https://one-draw.jp/ijinden/cardlist/003/card/03_038.png</text:p>
          </table:table-cell>
          <table:table-cell table:formula="of:=CONCATENATE([$JSON.$A$1];[.$C267];[$JSON.$B$1];[.$E267];[$JSON.$C$1];[.$F267];[$JSON.$D$1];IF(ISNA([.$S267]);&quot;null&quot;;&quot;&quot;&quot;&quot;&amp;[.$S267]&amp;&quot;&quot;&quot;&quot;);[$JSON.$E$1];[.$U267];[$JSON.$F$1];IF(ISNA([.$V267]);&quot;null&quot;;&quot;&quot;&quot;&quot;&amp;[.$V267]&amp;&quot;&quot;&quot;&quot;);[$JSON.$G$1];[.$X267];[$JSON.$H$1];[.$H267];[$JSON.$I$1];[.J267];[$JSON.$J$1];[.$L267];[$JSON.$K$1];[.$O267];[$JSON.$L$1];[.$N267];[$JSON.$M$1];[.$R267];[$JSON.$N$1];[.$T267];[$JSON.$O$1];[.$W267];[$JSON.$P$1];[.$A267];[$JSON.$Q$1];[.$B267];[$JSON.$R$1])" office:value-type="string" office:string-value="{&quot;id&quot;:&quot;3-38&quot;,&quot;name&quot;:&quot;司馬炎&quot;,&quot;kana&quot;:&quot;しばえん&quot;,&quot;traitText&quot;:null,&quot;ruleText&quot;:&quot;戦場に置かれたとき、自分の戦場のガーディアン1体につき、戦場のイジン1体を山札の下に戻す。&quot;,&quot;legacyText&quot;:&quot;反魂&quot;,&quot;imageUrl&quot;:&quot;https://one-draw.jp/ijinden/cardlist/003/card/03_038.png&quot;,&quot;expansion&quot;:35,&quot;rarity&quot;:1,&quot;type&quot;:1,&quot;level&quot;:9,&quot;color&quot;:8,&quot;term&quot;:0,&quot;trait&quot;:0,&quot;legacy&quot;:6,&quot;orderTable&quot;:266,&quot;orderDeck&quot;:233}," calcext:value-type="string">
            <text:p>{"id":"3-38","name":"司馬炎","kana":"しばえん","traitText":null,"ruleText":"戦場に置かれたとき、自分の戦場のガーディアン1体につき、戦場のイジン1体を山札の下に戻す。","legacyText":"反魂","imageUrl":"https://one-draw.jp/ijinden/cardlist/003/card/03_038.png","expansion":35,"rarity":1,"type":1,"level":9,"color":8,"term":0,"trait":0,"legacy":6,"orderTable":266,"orderDeck":233},</text:p>
          </table:table-cell>
          <table:table-cell table:number-columns-repeated="16347"/>
        </table:table-row>
        <table:table-row table:style-name="ro2">
          <table:table-cell office:value-type="float" office:value="267" calcext:value-type="float">
            <text:p>267</text:p>
          </table:table-cell>
          <table:table-cell office:value-type="float" office:value="227" calcext:value-type="float">
            <text:p>227</text:p>
          </table:table-cell>
          <table:table-cell office:value-type="string" calcext:value-type="string">
            <text:p>3-39</text:p>
          </table:table-cell>
          <table:table-cell office:value-type="float" office:value="39" calcext:value-type="float">
            <text:p>39</text:p>
          </table:table-cell>
          <table:table-cell office:value-type="string" calcext:value-type="string">
            <text:p>井伊直弼</text:p>
          </table:table-cell>
          <table:table-cell office:value-type="string" calcext:value-type="string">
            <text:p>いいなおすけ</text:p>
          </table:table-cell>
          <table:table-cell office:value-type="string" calcext:value-type="string">
            <text:p>第３弾ブースターパック</text:p>
          </table:table-cell>
          <table:table-cell table:formula="of:=VLOOKUP([.G268];[$収録番号.$A$1:$収録番号.$B$9];2;0)" office:value-type="float" office:value="35" calcext:value-type="float">
            <text:p>35</text:p>
          </table:table-cell>
          <table:table-cell office:value-type="string" calcext:value-type="string">
            <text:p>N</text:p>
          </table:table-cell>
          <table:table-cell table:formula="of:=VLOOKUP([.I268];[$レアリティ番号.$A$1:$レアリティ番号.$B$4];2;0)" office:value-type="float" office:value="1" calcext:value-type="float">
            <text:p>1</text:p>
          </table:table-cell>
          <table:table-cell office:value-type="string" calcext:value-type="string">
            <text:p>イジン</text:p>
          </table:table-cell>
          <table:table-cell table:formula="of:=VLOOKUP([.K268];[$種類番号.$A$1:$種類番号.$B$4];2;0)" office:value-type="float" office:value="1" calcext:value-type="float">
            <text:p>1</text:p>
          </table:table-cell>
          <table:table-cell office:value-type="string" calcext:value-type="string">
            <text:p>黄</text:p>
          </table:table-cell>
          <table:table-cell table:formula="of:=VLOOKUP([.M268];[$色番号.$A$1:$色番号.$B$10];2;0)" office:value-type="float" office:value="8" calcext:value-type="float">
            <text:p>8</text:p>
          </table:table-cell>
          <table:table-cell office:value-type="float" office:value="8" calcext:value-type="float">
            <text:p>8</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6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68];[$特性番号.$A$1:$特性番号.$B$8];2;0);0)" office:value-type="float" office:value="0" calcext:value-type="float">
            <text:p>0</text:p>
          </table:table-cell>
          <table:table-cell office:value-type="string" calcext:value-type="string">
            <text:p>ウォッチャー¶他のイジンが破壊されるたびに発動できる。そのカードを山札の下に戻す。¶自分のメインフェイズが開始したとき、自分の山札の下から2枚を見る。レベル7以下のイジンをすきなだけ戦場に置いて、残りを手札に加える。</text:p>
          </table:table-cell>
          <table:table-cell table:style-name="ce8" office:value-type="string" calcext:value-type="string">
            <text:p>魔力化</text:p>
          </table:table-cell>
          <table:table-cell table:formula="of:=IFERROR(VLOOKUP([.$V268];[$遺業能力番号.$A$1:$遺業能力番号.$B$9];2;0);0)" office:value-type="float" office:value="1" calcext:value-type="float">
            <text:p>1</text:p>
          </table:table-cell>
          <table:table-cell office:value-type="string" calcext:value-type="string">
            <text:p>https://one-draw.jp/ijinden/cardlist/003/card/03_039.png</text:p>
          </table:table-cell>
          <table:table-cell table:formula="of:=CONCATENATE([$JSON.$A$1];[.$C268];[$JSON.$B$1];[.$E268];[$JSON.$C$1];[.$F268];[$JSON.$D$1];IF(ISNA([.$S268]);&quot;null&quot;;&quot;&quot;&quot;&quot;&amp;[.$S268]&amp;&quot;&quot;&quot;&quot;);[$JSON.$E$1];[.$U268];[$JSON.$F$1];IF(ISNA([.$V268]);&quot;null&quot;;&quot;&quot;&quot;&quot;&amp;[.$V268]&amp;&quot;&quot;&quot;&quot;);[$JSON.$G$1];[.$X268];[$JSON.$H$1];[.$H268];[$JSON.$I$1];[.J268];[$JSON.$J$1];[.$L268];[$JSON.$K$1];[.$O268];[$JSON.$L$1];[.$N268];[$JSON.$M$1];[.$R268];[$JSON.$N$1];[.$T268];[$JSON.$O$1];[.$W268];[$JSON.$P$1];[.$A268];[$JSON.$Q$1];[.$B268];[$JSON.$R$1])" office:value-type="string" office:string-value="{&quot;id&quot;:&quot;3-39&quot;,&quot;name&quot;:&quot;井伊直弼&quot;,&quot;kana&quot;:&quot;いいなおすけ&quot;,&quot;traitText&quot;:null,&quot;ruleText&quot;:&quot;ウォッチャー¶他のイジンが破壊されるたびに発動できる。そのカードを山札の下に戻す。¶自分のメインフェイズが開始したとき、自分の山札の下から2枚を見る。レベル7以下のイジンをすきなだけ戦場に置いて、残りを手札に加える。&quot;,&quot;legacyText&quot;:&quot;魔力化&quot;,&quot;imageUrl&quot;:&quot;https://one-draw.jp/ijinden/cardlist/003/card/03_039.png&quot;,&quot;expansion&quot;:35,&quot;rarity&quot;:1,&quot;type&quot;:1,&quot;level&quot;:8,&quot;color&quot;:8,&quot;term&quot;:0,&quot;trait&quot;:0,&quot;legacy&quot;:1,&quot;orderTable&quot;:267,&quot;orderDeck&quot;:227}," calcext:value-type="string">
            <text:p>{"id":"3-39","name":"井伊直弼","kana":"いいなおすけ","traitText":null,"ruleText":"ウォッチャー¶他のイジンが破壊されるたびに発動できる。そのカードを山札の下に戻す。¶自分のメインフェイズが開始したとき、自分の山札の下から2枚を見る。レベル7以下のイジンをすきなだけ戦場に置いて、残りを手札に加える。","legacyText":"魔力化","imageUrl":"https://one-draw.jp/ijinden/cardlist/003/card/03_039.png","expansion":35,"rarity":1,"type":1,"level":8,"color":8,"term":0,"trait":0,"legacy":1,"orderTable":267,"orderDeck":227},</text:p>
          </table:table-cell>
          <table:table-cell table:number-columns-repeated="16347"/>
        </table:table-row>
        <table:table-row table:style-name="ro2">
          <table:table-cell office:value-type="float" office:value="268" calcext:value-type="float">
            <text:p>268</text:p>
          </table:table-cell>
          <table:table-cell office:value-type="float" office:value="98" calcext:value-type="float">
            <text:p>98</text:p>
          </table:table-cell>
          <table:table-cell office:value-type="string" calcext:value-type="string">
            <text:p>3-40</text:p>
          </table:table-cell>
          <table:table-cell office:value-type="float" office:value="40" calcext:value-type="float">
            <text:p>40</text:p>
          </table:table-cell>
          <table:table-cell office:value-type="string" calcext:value-type="string">
            <text:p>徳川家茂</text:p>
          </table:table-cell>
          <table:table-cell office:value-type="string" calcext:value-type="string">
            <text:p>とくがわいえもち</text:p>
          </table:table-cell>
          <table:table-cell office:value-type="string" calcext:value-type="string">
            <text:p>第３弾ブースターパック</text:p>
          </table:table-cell>
          <table:table-cell table:formula="of:=VLOOKUP([.G269];[$収録番号.$A$1:$収録番号.$B$9];2;0)" office:value-type="float" office:value="35" calcext:value-type="float">
            <text:p>35</text:p>
          </table:table-cell>
          <table:table-cell office:value-type="string" calcext:value-type="string">
            <text:p>N</text:p>
          </table:table-cell>
          <table:table-cell table:formula="of:=VLOOKUP([.I269];[$レアリティ番号.$A$1:$レアリティ番号.$B$4];2;0)" office:value-type="float" office:value="1" calcext:value-type="float">
            <text:p>1</text:p>
          </table:table-cell>
          <table:table-cell office:value-type="string" calcext:value-type="string">
            <text:p>イジン</text:p>
          </table:table-cell>
          <table:table-cell table:formula="of:=VLOOKUP([.K269];[$種類番号.$A$1:$種類番号.$B$4];2;0)" office:value-type="float" office:value="1" calcext:value-type="float">
            <text:p>1</text:p>
          </table:table-cell>
          <table:table-cell office:value-type="string" calcext:value-type="string">
            <text:p>黄</text:p>
          </table:table-cell>
          <table:table-cell table:formula="of:=VLOOKUP([.M269];[$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6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69];[$特性番号.$A$1:$特性番号.$B$8];2;0);0)" office:value-type="float" office:value="0" calcext:value-type="float">
            <text:p>0</text:p>
          </table:table-cell>
          <table:table-cell office:value-type="string" calcext:value-type="string">
            <text:p>レベル6以上のイジンが戦場に置かれたときに発動できる。戦場の他のイジンすべてを寝かせて、これを山札の下に戻す。</text:p>
          </table:table-cell>
          <table:table-cell table:style-name="ce8" table:formula="of:=NA()" office:value-type="string" office:string-value="" calcext:value-type="error">
            <text:p>#N/A</text:p>
          </table:table-cell>
          <table:table-cell table:formula="of:=IFERROR(VLOOKUP([.$V269];[$遺業能力番号.$A$1:$遺業能力番号.$B$9];2;0);0)" office:value-type="float" office:value="0" calcext:value-type="float">
            <text:p>0</text:p>
          </table:table-cell>
          <table:table-cell office:value-type="string" calcext:value-type="string">
            <text:p>https://one-draw.jp/ijinden/cardlist/003/card/03_040.png</text:p>
          </table:table-cell>
          <table:table-cell table:formula="of:=CONCATENATE([$JSON.$A$1];[.$C269];[$JSON.$B$1];[.$E269];[$JSON.$C$1];[.$F269];[$JSON.$D$1];IF(ISNA([.$S269]);&quot;null&quot;;&quot;&quot;&quot;&quot;&amp;[.$S269]&amp;&quot;&quot;&quot;&quot;);[$JSON.$E$1];[.$U269];[$JSON.$F$1];IF(ISNA([.$V269]);&quot;null&quot;;&quot;&quot;&quot;&quot;&amp;[.$V269]&amp;&quot;&quot;&quot;&quot;);[$JSON.$G$1];[.$X269];[$JSON.$H$1];[.$H269];[$JSON.$I$1];[.J269];[$JSON.$J$1];[.$L269];[$JSON.$K$1];[.$O269];[$JSON.$L$1];[.$N269];[$JSON.$M$1];[.$R269];[$JSON.$N$1];[.$T269];[$JSON.$O$1];[.$W269];[$JSON.$P$1];[.$A269];[$JSON.$Q$1];[.$B269];[$JSON.$R$1])" office:value-type="string" office:string-value="{&quot;id&quot;:&quot;3-40&quot;,&quot;name&quot;:&quot;徳川家茂&quot;,&quot;kana&quot;:&quot;とくがわいえもち&quot;,&quot;traitText&quot;:null,&quot;ruleText&quot;:&quot;レベル6以上のイジンが戦場に置かれたときに発動できる。戦場の他のイジンすべてを寝かせて、これを山札の下に戻す。&quot;,&quot;legacyText&quot;:null,&quot;imageUrl&quot;:&quot;https://one-draw.jp/ijinden/cardlist/003/card/03_040.png&quot;,&quot;expansion&quot;:35,&quot;rarity&quot;:1,&quot;type&quot;:1,&quot;level&quot;:3,&quot;color&quot;:8,&quot;term&quot;:0,&quot;trait&quot;:0,&quot;legacy&quot;:0,&quot;orderTable&quot;:268,&quot;orderDeck&quot;:98}," calcext:value-type="string">
            <text:p>{"id":"3-40","name":"徳川家茂","kana":"とくがわいえもち","traitText":null,"ruleText":"レベル6以上のイジンが戦場に置かれたときに発動できる。戦場の他のイジンすべてを寝かせて、これを山札の下に戻す。","legacyText":null,"imageUrl":"https://one-draw.jp/ijinden/cardlist/003/card/03_040.png","expansion":35,"rarity":1,"type":1,"level":3,"color":8,"term":0,"trait":0,"legacy":0,"orderTable":268,"orderDeck":98},</text:p>
          </table:table-cell>
          <table:table-cell table:number-columns-repeated="16347"/>
        </table:table-row>
        <table:table-row table:style-name="ro2">
          <table:table-cell office:value-type="float" office:value="269" calcext:value-type="float">
            <text:p>269</text:p>
          </table:table-cell>
          <table:table-cell office:value-type="float" office:value="216" calcext:value-type="float">
            <text:p>216</text:p>
          </table:table-cell>
          <table:table-cell office:value-type="string" calcext:value-type="string">
            <text:p>3-41</text:p>
          </table:table-cell>
          <table:table-cell office:value-type="float" office:value="41" calcext:value-type="float">
            <text:p>41</text:p>
          </table:table-cell>
          <table:table-cell office:value-type="string" calcext:value-type="string">
            <text:p>松平定信</text:p>
          </table:table-cell>
          <table:table-cell office:value-type="string" calcext:value-type="string">
            <text:p>まつだいらさだのぶ</text:p>
          </table:table-cell>
          <table:table-cell office:value-type="string" calcext:value-type="string">
            <text:p>第３弾ブースターパック</text:p>
          </table:table-cell>
          <table:table-cell table:formula="of:=VLOOKUP([.G270];[$収録番号.$A$1:$収録番号.$B$9];2;0)" office:value-type="float" office:value="35" calcext:value-type="float">
            <text:p>35</text:p>
          </table:table-cell>
          <table:table-cell office:value-type="string" calcext:value-type="string">
            <text:p>N</text:p>
          </table:table-cell>
          <table:table-cell table:formula="of:=VLOOKUP([.I270];[$レアリティ番号.$A$1:$レアリティ番号.$B$4];2;0)" office:value-type="float" office:value="1" calcext:value-type="float">
            <text:p>1</text:p>
          </table:table-cell>
          <table:table-cell office:value-type="string" calcext:value-type="string">
            <text:p>イジン</text:p>
          </table:table-cell>
          <table:table-cell table:formula="of:=VLOOKUP([.K270];[$種類番号.$A$1:$種類番号.$B$4];2;0)" office:value-type="float" office:value="1" calcext:value-type="float">
            <text:p>1</text:p>
          </table:table-cell>
          <table:table-cell office:value-type="string" calcext:value-type="string">
            <text:p>黄</text:p>
          </table:table-cell>
          <table:table-cell table:formula="of:=VLOOKUP([.M270];[$色番号.$A$1:$色番号.$B$10];2;0)" office:value-type="float" office:value="8" calcext:value-type="float">
            <text:p>8</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7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70];[$特性番号.$A$1:$特性番号.$B$8];2;0);0)" office:value-type="float" office:value="0" calcext:value-type="float">
            <text:p>0</text:p>
          </table:table-cell>
          <table:table-cell office:value-type="string" calcext:value-type="string">
            <text:p>戦場に置かれたとき、相手の戦場の寝ているイジンすべてを山札の下に戻す。¶この能力はターンに1回しか発動しない。カードが山札に戻されたときに発動できる。自分の山札の下から1枚を手札に加える。</text:p>
          </table:table-cell>
          <table:table-cell table:style-name="ce8" office:value-type="string" calcext:value-type="string">
            <text:p>山札の上か下に戻す</text:p>
          </table:table-cell>
          <table:table-cell table:formula="of:=IFERROR(VLOOKUP([.$V270];[$遺業能力番号.$A$1:$遺業能力番号.$B$9];2;0);0)" office:value-type="float" office:value="7" calcext:value-type="float">
            <text:p>7</text:p>
          </table:table-cell>
          <table:table-cell office:value-type="string" calcext:value-type="string">
            <text:p>https://one-draw.jp/ijinden/cardlist/003/card/03_041.png</text:p>
          </table:table-cell>
          <table:table-cell table:formula="of:=CONCATENATE([$JSON.$A$1];[.$C270];[$JSON.$B$1];[.$E270];[$JSON.$C$1];[.$F270];[$JSON.$D$1];IF(ISNA([.$S270]);&quot;null&quot;;&quot;&quot;&quot;&quot;&amp;[.$S270]&amp;&quot;&quot;&quot;&quot;);[$JSON.$E$1];[.$U270];[$JSON.$F$1];IF(ISNA([.$V270]);&quot;null&quot;;&quot;&quot;&quot;&quot;&amp;[.$V270]&amp;&quot;&quot;&quot;&quot;);[$JSON.$G$1];[.$X270];[$JSON.$H$1];[.$H270];[$JSON.$I$1];[.J270];[$JSON.$J$1];[.$L270];[$JSON.$K$1];[.$O270];[$JSON.$L$1];[.$N270];[$JSON.$M$1];[.$R270];[$JSON.$N$1];[.$T270];[$JSON.$O$1];[.$W270];[$JSON.$P$1];[.$A270];[$JSON.$Q$1];[.$B270];[$JSON.$R$1])" office:value-type="string" office:string-value="{&quot;id&quot;:&quot;3-41&quot;,&quot;name&quot;:&quot;松平定信&quot;,&quot;kana&quot;:&quot;まつだいらさだのぶ&quot;,&quot;traitText&quot;:null,&quot;ruleText&quot;:&quot;戦場に置かれたとき、相手の戦場の寝ているイジンすべてを山札の下に戻す。¶この能力はターンに1回しか発動しない。カードが山札に戻されたときに発動できる。自分の山札の下から1枚を手札に加える。&quot;,&quot;legacyText&quot;:&quot;山札の上か下に戻す&quot;,&quot;imageUrl&quot;:&quot;https://one-draw.jp/ijinden/cardlist/003/card/03_041.png&quot;,&quot;expansion&quot;:35,&quot;rarity&quot;:1,&quot;type&quot;:1,&quot;level&quot;:7,&quot;color&quot;:8,&quot;term&quot;:0,&quot;trait&quot;:0,&quot;legacy&quot;:7,&quot;orderTable&quot;:269,&quot;orderDeck&quot;:216}," calcext:value-type="string">
            <text:p>{"id":"3-41","name":"松平定信","kana":"まつだいらさだのぶ","traitText":null,"ruleText":"戦場に置かれたとき、相手の戦場の寝ているイジンすべてを山札の下に戻す。¶この能力はターンに1回しか発動しない。カードが山札に戻されたときに発動できる。自分の山札の下から1枚を手札に加える。","legacyText":"山札の上か下に戻す","imageUrl":"https://one-draw.jp/ijinden/cardlist/003/card/03_041.png","expansion":35,"rarity":1,"type":1,"level":7,"color":8,"term":0,"trait":0,"legacy":7,"orderTable":269,"orderDeck":216},</text:p>
          </table:table-cell>
          <table:table-cell table:number-columns-repeated="16347"/>
        </table:table-row>
        <table:table-row table:style-name="ro2">
          <table:table-cell office:value-type="float" office:value="270" calcext:value-type="float">
            <text:p>270</text:p>
          </table:table-cell>
          <table:table-cell office:value-type="float" office:value="56" calcext:value-type="float">
            <text:p>56</text:p>
          </table:table-cell>
          <table:table-cell office:value-type="string" calcext:value-type="string">
            <text:p>3-42</text:p>
          </table:table-cell>
          <table:table-cell office:value-type="float" office:value="42" calcext:value-type="float">
            <text:p>42</text:p>
          </table:table-cell>
          <table:table-cell office:value-type="string" calcext:value-type="string">
            <text:p>ルイス・キャロル</text:p>
          </table:table-cell>
          <table:table-cell office:value-type="string" calcext:value-type="string">
            <text:p>るいすきゃろる</text:p>
          </table:table-cell>
          <table:table-cell office:value-type="string" calcext:value-type="string">
            <text:p>第３弾ブースターパック</text:p>
          </table:table-cell>
          <table:table-cell table:formula="of:=VLOOKUP([.G271];[$収録番号.$A$1:$収録番号.$B$9];2;0)" office:value-type="float" office:value="35" calcext:value-type="float">
            <text:p>35</text:p>
          </table:table-cell>
          <table:table-cell office:value-type="string" calcext:value-type="string">
            <text:p>R</text:p>
          </table:table-cell>
          <table:table-cell table:formula="of:=VLOOKUP([.I271];[$レアリティ番号.$A$1:$レアリティ番号.$B$4];2;0)" office:value-type="float" office:value="2" calcext:value-type="float">
            <text:p>2</text:p>
          </table:table-cell>
          <table:table-cell office:value-type="string" calcext:value-type="string">
            <text:p>イジン</text:p>
          </table:table-cell>
          <table:table-cell table:formula="of:=VLOOKUP([.K271];[$種類番号.$A$1:$種類番号.$B$4];2;0)" office:value-type="float" office:value="1" calcext:value-type="float">
            <text:p>1</text:p>
          </table:table-cell>
          <table:table-cell office:value-type="string" calcext:value-type="string">
            <text:p>黄</text:p>
          </table:table-cell>
          <table:table-cell table:formula="of:=VLOOKUP([.M271];[$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執筆</text:p>
          </table:table-cell>
          <table:table-cell table:formula="of:=IFERROR(VLOOKUP([.$Q271];[$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271];[$特性番号.$A$1:$特性番号.$B$8];2;0);0)" office:value-type="float" office:value="0" calcext:value-type="float">
            <text:p>0</text:p>
          </table:table-cell>
          <table:table-cell office:value-type="string" calcext:value-type="string">
            <text:p>執筆 - この能力は効果を持たない。¶自分はイジン召喚に際し、イジン召喚権でなくマリョク配置権を使ってもよい。¶自分はマリョク配置に際し、マリョク配置権でなくイジン召喚権を使ってもよい。</text:p>
          </table:table-cell>
          <table:table-cell table:style-name="ce8" table:formula="of:=NA()" office:value-type="string" office:string-value="" calcext:value-type="error">
            <text:p>#N/A</text:p>
          </table:table-cell>
          <table:table-cell table:formula="of:=IFERROR(VLOOKUP([.$V271];[$遺業能力番号.$A$1:$遺業能力番号.$B$9];2;0);0)" office:value-type="float" office:value="0" calcext:value-type="float">
            <text:p>0</text:p>
          </table:table-cell>
          <table:table-cell office:value-type="string" calcext:value-type="string">
            <text:p>https://one-draw.jp/ijinden/cardlist/003/card/03_042.png</text:p>
          </table:table-cell>
          <table:table-cell table:formula="of:=CONCATENATE([$JSON.$A$1];[.$C271];[$JSON.$B$1];[.$E271];[$JSON.$C$1];[.$F271];[$JSON.$D$1];IF(ISNA([.$S271]);&quot;null&quot;;&quot;&quot;&quot;&quot;&amp;[.$S271]&amp;&quot;&quot;&quot;&quot;);[$JSON.$E$1];[.$U271];[$JSON.$F$1];IF(ISNA([.$V271]);&quot;null&quot;;&quot;&quot;&quot;&quot;&amp;[.$V271]&amp;&quot;&quot;&quot;&quot;);[$JSON.$G$1];[.$X271];[$JSON.$H$1];[.$H271];[$JSON.$I$1];[.J271];[$JSON.$J$1];[.$L271];[$JSON.$K$1];[.$O271];[$JSON.$L$1];[.$N271];[$JSON.$M$1];[.$R271];[$JSON.$N$1];[.$T271];[$JSON.$O$1];[.$W271];[$JSON.$P$1];[.$A271];[$JSON.$Q$1];[.$B271];[$JSON.$R$1])" office:value-type="string" office:string-value="{&quot;id&quot;:&quot;3-42&quot;,&quot;name&quot;:&quot;ルイス・キャロル&quot;,&quot;kana&quot;:&quot;るいすきゃろる&quot;,&quot;traitText&quot;:null,&quot;ruleText&quot;:&quot;執筆 - この能力は効果を持たない。¶自分はイジン召喚に際し、イジン召喚権でなくマリョク配置権を使ってもよい。¶自分はマリョク配置に際し、マリョク配置権でなくイジン召喚権を使ってもよい。&quot;,&quot;legacyText&quot;:null,&quot;imageUrl&quot;:&quot;https://one-draw.jp/ijinden/cardlist/003/card/03_042.png&quot;,&quot;expansion&quot;:35,&quot;rarity&quot;:2,&quot;type&quot;:1,&quot;level&quot;:2,&quot;color&quot;:8,&quot;term&quot;:2,&quot;trait&quot;:0,&quot;legacy&quot;:0,&quot;orderTable&quot;:270,&quot;orderDeck&quot;:56}," calcext:value-type="string">
            <text:p>{"id":"3-42","name":"ルイス・キャロル","kana":"るいすきゃろる","traitText":null,"ruleText":"執筆 - この能力は効果を持たない。¶自分はイジン召喚に際し、イジン召喚権でなくマリョク配置権を使ってもよい。¶自分はマリョク配置に際し、マリョク配置権でなくイジン召喚権を使ってもよい。","legacyText":null,"imageUrl":"https://one-draw.jp/ijinden/cardlist/003/card/03_042.png","expansion":35,"rarity":2,"type":1,"level":2,"color":8,"term":2,"trait":0,"legacy":0,"orderTable":270,"orderDeck":56},</text:p>
          </table:table-cell>
          <table:table-cell table:number-columns-repeated="16347"/>
        </table:table-row>
        <table:table-row table:style-name="ro2">
          <table:table-cell office:value-type="float" office:value="271" calcext:value-type="float">
            <text:p>271</text:p>
          </table:table-cell>
          <table:table-cell office:value-type="float" office:value="21" calcext:value-type="float">
            <text:p>21</text:p>
          </table:table-cell>
          <table:table-cell office:value-type="string" calcext:value-type="string">
            <text:p>3-43</text:p>
          </table:table-cell>
          <table:table-cell office:value-type="float" office:value="43" calcext:value-type="float">
            <text:p>43</text:p>
          </table:table-cell>
          <table:table-cell office:value-type="string" calcext:value-type="string">
            <text:p>芹沢鴨</text:p>
          </table:table-cell>
          <table:table-cell office:value-type="string" calcext:value-type="string">
            <text:p>せりざわかも</text:p>
          </table:table-cell>
          <table:table-cell office:value-type="string" calcext:value-type="string">
            <text:p>第３弾ブースターパック</text:p>
          </table:table-cell>
          <table:table-cell table:formula="of:=VLOOKUP([.G272];[$収録番号.$A$1:$収録番号.$B$9];2;0)" office:value-type="float" office:value="35" calcext:value-type="float">
            <text:p>35</text:p>
          </table:table-cell>
          <table:table-cell office:value-type="string" calcext:value-type="string">
            <text:p>N</text:p>
          </table:table-cell>
          <table:table-cell table:formula="of:=VLOOKUP([.I272];[$レアリティ番号.$A$1:$レアリティ番号.$B$4];2;0)" office:value-type="float" office:value="1" calcext:value-type="float">
            <text:p>1</text:p>
          </table:table-cell>
          <table:table-cell office:value-type="string" calcext:value-type="string">
            <text:p>イジン</text:p>
          </table:table-cell>
          <table:table-cell table:formula="of:=VLOOKUP([.K272];[$種類番号.$A$1:$種類番号.$B$4];2;0)" office:value-type="float" office:value="1" calcext:value-type="float">
            <text:p>1</text:p>
          </table:table-cell>
          <table:table-cell office:value-type="string" calcext:value-type="string">
            <text:p>紫</text:p>
          </table:table-cell>
          <table:table-cell table:formula="of:=VLOOKUP([.M272];[$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72];[$能力語番号.$A$1:$能力語番号.$B$10];2;0);0)" office:value-type="float" office:value="0" calcext:value-type="float">
            <text:p>0</text:p>
          </table:table-cell>
          <table:table-cell office:value-type="string" calcext:value-type="string">
            <text:p>志願</text:p>
          </table:table-cell>
          <table:table-cell table:formula="of:=IFERROR(VLOOKUP([.$S272];[$特性番号.$A$1:$特性番号.$B$8];2;0);0)" office:value-type="float" office:value="32" calcext:value-type="float">
            <text:p>32</text:p>
          </table:table-cell>
          <table:table-cell office:value-type="string" calcext:value-type="string">
            <text:p>戦場に置かれたとき、相手の手札のカード1つを墓地に置く。そのカードは相手が選ぶ。自分の手札のカード1つを墓地に置く。</text:p>
          </table:table-cell>
          <table:table-cell table:style-name="ce8" office:value-type="string" calcext:value-type="string">
            <text:p>1ドローする</text:p>
          </table:table-cell>
          <table:table-cell table:formula="of:=IFERROR(VLOOKUP([.$V272];[$遺業能力番号.$A$1:$遺業能力番号.$B$9];2;0);0)" office:value-type="float" office:value="4" calcext:value-type="float">
            <text:p>4</text:p>
          </table:table-cell>
          <table:table-cell office:value-type="string" calcext:value-type="string">
            <text:p>https://one-draw.jp/ijinden/cardlist/003/card/03_043.png</text:p>
          </table:table-cell>
          <table:table-cell table:formula="of:=CONCATENATE([$JSON.$A$1];[.$C272];[$JSON.$B$1];[.$E272];[$JSON.$C$1];[.$F272];[$JSON.$D$1];IF(ISNA([.$S272]);&quot;null&quot;;&quot;&quot;&quot;&quot;&amp;[.$S272]&amp;&quot;&quot;&quot;&quot;);[$JSON.$E$1];[.$U272];[$JSON.$F$1];IF(ISNA([.$V272]);&quot;null&quot;;&quot;&quot;&quot;&quot;&amp;[.$V272]&amp;&quot;&quot;&quot;&quot;);[$JSON.$G$1];[.$X272];[$JSON.$H$1];[.$H272];[$JSON.$I$1];[.J272];[$JSON.$J$1];[.$L272];[$JSON.$K$1];[.$O272];[$JSON.$L$1];[.$N272];[$JSON.$M$1];[.$R272];[$JSON.$N$1];[.$T272];[$JSON.$O$1];[.$W272];[$JSON.$P$1];[.$A272];[$JSON.$Q$1];[.$B272];[$JSON.$R$1])" office:value-type="string" office:string-value="{&quot;id&quot;:&quot;3-43&quot;,&quot;name&quot;:&quot;芹沢鴨&quot;,&quot;kana&quot;:&quot;せりざわかも&quot;,&quot;traitText&quot;:&quot;志願&quot;,&quot;ruleText&quot;:&quot;戦場に置かれたとき、相手の手札のカード1つを墓地に置く。そのカードは相手が選ぶ。自分の手札のカード1つを墓地に置く。&quot;,&quot;legacyText&quot;:&quot;1ドローする&quot;,&quot;imageUrl&quot;:&quot;https://one-draw.jp/ijinden/cardlist/003/card/03_043.png&quot;,&quot;expansion&quot;:35,&quot;rarity&quot;:1,&quot;type&quot;:1,&quot;level&quot;:1,&quot;color&quot;:16,&quot;term&quot;:0,&quot;trait&quot;:32,&quot;legacy&quot;:4,&quot;orderTable&quot;:271,&quot;orderDeck&quot;:21}," calcext:value-type="string">
            <text:p>{"id":"3-43","name":"芹沢鴨","kana":"せりざわかも","traitText":"志願","ruleText":"戦場に置かれたとき、相手の手札のカード1つを墓地に置く。そのカードは相手が選ぶ。自分の手札のカード1つを墓地に置く。","legacyText":"1ドローする","imageUrl":"https://one-draw.jp/ijinden/cardlist/003/card/03_043.png","expansion":35,"rarity":1,"type":1,"level":1,"color":16,"term":0,"trait":32,"legacy":4,"orderTable":271,"orderDeck":21},</text:p>
          </table:table-cell>
          <table:table-cell table:number-columns-repeated="16347"/>
        </table:table-row>
        <table:table-row table:style-name="ro2">
          <table:table-cell office:value-type="float" office:value="272" calcext:value-type="float">
            <text:p>272</text:p>
          </table:table-cell>
          <table:table-cell office:value-type="float" office:value="141" calcext:value-type="float">
            <text:p>141</text:p>
          </table:table-cell>
          <table:table-cell office:value-type="string" calcext:value-type="string">
            <text:p>3-44</text:p>
          </table:table-cell>
          <table:table-cell office:value-type="float" office:value="44" calcext:value-type="float">
            <text:p>44</text:p>
          </table:table-cell>
          <table:table-cell office:value-type="string" calcext:value-type="string">
            <text:p>本居宣長</text:p>
          </table:table-cell>
          <table:table-cell office:value-type="string" calcext:value-type="string">
            <text:p>もとおりのりなが</text:p>
          </table:table-cell>
          <table:table-cell office:value-type="string" calcext:value-type="string">
            <text:p>第３弾ブースターパック</text:p>
          </table:table-cell>
          <table:table-cell table:formula="of:=VLOOKUP([.G273];[$収録番号.$A$1:$収録番号.$B$9];2;0)" office:value-type="float" office:value="35" calcext:value-type="float">
            <text:p>35</text:p>
          </table:table-cell>
          <table:table-cell office:value-type="string" calcext:value-type="string">
            <text:p>N</text:p>
          </table:table-cell>
          <table:table-cell table:formula="of:=VLOOKUP([.I273];[$レアリティ番号.$A$1:$レアリティ番号.$B$4];2;0)" office:value-type="float" office:value="1" calcext:value-type="float">
            <text:p>1</text:p>
          </table:table-cell>
          <table:table-cell office:value-type="string" calcext:value-type="string">
            <text:p>イジン</text:p>
          </table:table-cell>
          <table:table-cell table:formula="of:=VLOOKUP([.K273];[$種類番号.$A$1:$種類番号.$B$4];2;0)" office:value-type="float" office:value="1" calcext:value-type="float">
            <text:p>1</text:p>
          </table:table-cell>
          <table:table-cell office:value-type="string" calcext:value-type="string">
            <text:p>紫</text:p>
          </table:table-cell>
          <table:table-cell table:formula="of:=VLOOKUP([.M273];[$色番号.$A$1:$色番号.$B$10];2;0)" office:value-type="float" office:value="16" calcext:value-type="float">
            <text:p>16</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73];[$能力語番号.$A$1:$能力語番号.$B$10];2;0);0)" office:value-type="float" office:value="0" calcext:value-type="float">
            <text:p>0</text:p>
          </table:table-cell>
          <table:table-cell office:value-type="string" calcext:value-type="string">
            <text:p>医術</text:p>
          </table:table-cell>
          <table:table-cell table:formula="of:=IFERROR(VLOOKUP([.$S273];[$特性番号.$A$1:$特性番号.$B$8];2;0);0)" office:value-type="float" office:value="16" calcext:value-type="float">
            <text:p>16</text:p>
          </table:table-cell>
          <table:table-cell office:value-type="string" calcext:value-type="string">
            <text:p>「医術」イジンが自分の戦場に置かれたときに発動できる。1ドローする。相手は1ドローする。</text:p>
          </table:table-cell>
          <table:table-cell table:style-name="ce8" office:value-type="string" calcext:value-type="string">
            <text:p>木霊</text:p>
          </table:table-cell>
          <table:table-cell table:formula="of:=IFERROR(VLOOKUP([.$V273];[$遺業能力番号.$A$1:$遺業能力番号.$B$9];2;0);0)" office:value-type="float" office:value="8" calcext:value-type="float">
            <text:p>8</text:p>
          </table:table-cell>
          <table:table-cell office:value-type="string" calcext:value-type="string">
            <text:p>https://one-draw.jp/ijinden/cardlist/003/card/03_044.png</text:p>
          </table:table-cell>
          <table:table-cell table:formula="of:=CONCATENATE([$JSON.$A$1];[.$C273];[$JSON.$B$1];[.$E273];[$JSON.$C$1];[.$F273];[$JSON.$D$1];IF(ISNA([.$S273]);&quot;null&quot;;&quot;&quot;&quot;&quot;&amp;[.$S273]&amp;&quot;&quot;&quot;&quot;);[$JSON.$E$1];[.$U273];[$JSON.$F$1];IF(ISNA([.$V273]);&quot;null&quot;;&quot;&quot;&quot;&quot;&amp;[.$V273]&amp;&quot;&quot;&quot;&quot;);[$JSON.$G$1];[.$X273];[$JSON.$H$1];[.$H273];[$JSON.$I$1];[.J273];[$JSON.$J$1];[.$L273];[$JSON.$K$1];[.$O273];[$JSON.$L$1];[.$N273];[$JSON.$M$1];[.$R273];[$JSON.$N$1];[.$T273];[$JSON.$O$1];[.$W273];[$JSON.$P$1];[.$A273];[$JSON.$Q$1];[.$B273];[$JSON.$R$1])" office:value-type="string" office:string-value="{&quot;id&quot;:&quot;3-44&quot;,&quot;name&quot;:&quot;本居宣長&quot;,&quot;kana&quot;:&quot;もとおりのりなが&quot;,&quot;traitText&quot;:&quot;医術&quot;,&quot;ruleText&quot;:&quot;「医術」イジンが自分の戦場に置かれたときに発動できる。1ドローする。相手は1ドローする。&quot;,&quot;legacyText&quot;:&quot;木霊&quot;,&quot;imageUrl&quot;:&quot;https://one-draw.jp/ijinden/cardlist/003/card/03_044.png&quot;,&quot;expansion&quot;:35,&quot;rarity&quot;:1,&quot;type&quot;:1,&quot;level&quot;:4,&quot;color&quot;:16,&quot;term&quot;:0,&quot;trait&quot;:16,&quot;legacy&quot;:8,&quot;orderTable&quot;:272,&quot;orderDeck&quot;:141}," calcext:value-type="string">
            <text:p>{"id":"3-44","name":"本居宣長","kana":"もとおりのりなが","traitText":"医術","ruleText":"「医術」イジンが自分の戦場に置かれたときに発動できる。1ドローする。相手は1ドローする。","legacyText":"木霊","imageUrl":"https://one-draw.jp/ijinden/cardlist/003/card/03_044.png","expansion":35,"rarity":1,"type":1,"level":4,"color":16,"term":0,"trait":16,"legacy":8,"orderTable":272,"orderDeck":141},</text:p>
          </table:table-cell>
          <table:table-cell table:number-columns-repeated="16347"/>
        </table:table-row>
        <table:table-row table:style-name="ro2">
          <table:table-cell office:value-type="float" office:value="273" calcext:value-type="float">
            <text:p>273</text:p>
          </table:table-cell>
          <table:table-cell office:value-type="float" office:value="103" calcext:value-type="float">
            <text:p>103</text:p>
          </table:table-cell>
          <table:table-cell office:value-type="string" calcext:value-type="string">
            <text:p>3-45</text:p>
          </table:table-cell>
          <table:table-cell office:value-type="float" office:value="45" calcext:value-type="float">
            <text:p>45</text:p>
          </table:table-cell>
          <table:table-cell office:value-type="string" calcext:value-type="string">
            <text:p>坂本龍馬</text:p>
          </table:table-cell>
          <table:table-cell office:value-type="string" calcext:value-type="string">
            <text:p>さかもとりょうま</text:p>
          </table:table-cell>
          <table:table-cell office:value-type="string" calcext:value-type="string">
            <text:p>第３弾ブースターパック</text:p>
          </table:table-cell>
          <table:table-cell table:formula="of:=VLOOKUP([.G274];[$収録番号.$A$1:$収録番号.$B$9];2;0)" office:value-type="float" office:value="35" calcext:value-type="float">
            <text:p>35</text:p>
          </table:table-cell>
          <table:table-cell office:value-type="string" calcext:value-type="string">
            <text:p>R</text:p>
          </table:table-cell>
          <table:table-cell table:formula="of:=VLOOKUP([.I274];[$レアリティ番号.$A$1:$レアリティ番号.$B$4];2;0)" office:value-type="float" office:value="2" calcext:value-type="float">
            <text:p>2</text:p>
          </table:table-cell>
          <table:table-cell office:value-type="string" calcext:value-type="string">
            <text:p>イジン</text:p>
          </table:table-cell>
          <table:table-cell table:formula="of:=VLOOKUP([.K274];[$種類番号.$A$1:$種類番号.$B$4];2;0)" office:value-type="float" office:value="1" calcext:value-type="float">
            <text:p>1</text:p>
          </table:table-cell>
          <table:table-cell office:value-type="string" calcext:value-type="string">
            <text:p>紫</text:p>
          </table:table-cell>
          <table:table-cell table:formula="of:=VLOOKUP([.M274];[$色番号.$A$1:$色番号.$B$10];2;0)" office:value-type="float" office:value="16" calcext:value-type="float">
            <text:p>16</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7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74];[$特性番号.$A$1:$特性番号.$B$8];2;0);0)" office:value-type="float" office:value="0" calcext:value-type="float">
            <text:p>0</text:p>
          </table:table-cell>
          <table:table-cell office:value-type="string" calcext:value-type="string">
            <text:p>戦場に置かれたときに発動できる。自分の戦場のガーディアンすべてを手札に戻す。自分の手札のカード1つをガーディアンにして戦場に置いてもよい。</text:p>
          </table:table-cell>
          <table:table-cell table:style-name="ce8" table:formula="of:=NA()" office:value-type="string" office:string-value="" calcext:value-type="error">
            <text:p>#N/A</text:p>
          </table:table-cell>
          <table:table-cell table:formula="of:=IFERROR(VLOOKUP([.$V274];[$遺業能力番号.$A$1:$遺業能力番号.$B$9];2;0);0)" office:value-type="float" office:value="0" calcext:value-type="float">
            <text:p>0</text:p>
          </table:table-cell>
          <table:table-cell office:value-type="string" calcext:value-type="string">
            <text:p>https://one-draw.jp/ijinden/cardlist/003/card/03_045.png</text:p>
          </table:table-cell>
          <table:table-cell table:formula="of:=CONCATENATE([$JSON.$A$1];[.$C274];[$JSON.$B$1];[.$E274];[$JSON.$C$1];[.$F274];[$JSON.$D$1];IF(ISNA([.$S274]);&quot;null&quot;;&quot;&quot;&quot;&quot;&amp;[.$S274]&amp;&quot;&quot;&quot;&quot;);[$JSON.$E$1];[.$U274];[$JSON.$F$1];IF(ISNA([.$V274]);&quot;null&quot;;&quot;&quot;&quot;&quot;&amp;[.$V274]&amp;&quot;&quot;&quot;&quot;);[$JSON.$G$1];[.$X274];[$JSON.$H$1];[.$H274];[$JSON.$I$1];[.J274];[$JSON.$J$1];[.$L274];[$JSON.$K$1];[.$O274];[$JSON.$L$1];[.$N274];[$JSON.$M$1];[.$R274];[$JSON.$N$1];[.$T274];[$JSON.$O$1];[.$W274];[$JSON.$P$1];[.$A274];[$JSON.$Q$1];[.$B274];[$JSON.$R$1])" office:value-type="string" office:string-value="{&quot;id&quot;:&quot;3-45&quot;,&quot;name&quot;:&quot;坂本龍馬&quot;,&quot;kana&quot;:&quot;さかもとりょうま&quot;,&quot;traitText&quot;:null,&quot;ruleText&quot;:&quot;戦場に置かれたときに発動できる。自分の戦場のガーディアンすべてを手札に戻す。自分の手札のカード1つをガーディアンにして戦場に置いてもよい。&quot;,&quot;legacyText&quot;:null,&quot;imageUrl&quot;:&quot;https://one-draw.jp/ijinden/cardlist/003/card/03_045.png&quot;,&quot;expansion&quot;:35,&quot;rarity&quot;:2,&quot;type&quot;:1,&quot;level&quot;:3,&quot;color&quot;:16,&quot;term&quot;:0,&quot;trait&quot;:0,&quot;legacy&quot;:0,&quot;orderTable&quot;:273,&quot;orderDeck&quot;:103}," calcext:value-type="string">
            <text:p>{"id":"3-45","name":"坂本龍馬","kana":"さかもとりょうま","traitText":null,"ruleText":"戦場に置かれたときに発動できる。自分の戦場のガーディアンすべてを手札に戻す。自分の手札のカード1つをガーディアンにして戦場に置いてもよい。","legacyText":null,"imageUrl":"https://one-draw.jp/ijinden/cardlist/003/card/03_045.png","expansion":35,"rarity":2,"type":1,"level":3,"color":16,"term":0,"trait":0,"legacy":0,"orderTable":273,"orderDeck":103},</text:p>
          </table:table-cell>
          <table:table-cell table:number-columns-repeated="16347"/>
        </table:table-row>
        <table:table-row table:style-name="ro2">
          <table:table-cell office:value-type="float" office:value="274" calcext:value-type="float">
            <text:p>274</text:p>
          </table:table-cell>
          <table:table-cell office:value-type="float" office:value="218" calcext:value-type="float">
            <text:p>218</text:p>
          </table:table-cell>
          <table:table-cell office:value-type="string" calcext:value-type="string">
            <text:p>3-46</text:p>
          </table:table-cell>
          <table:table-cell office:value-type="float" office:value="46" calcext:value-type="float">
            <text:p>46</text:p>
          </table:table-cell>
          <table:table-cell office:value-type="string" calcext:value-type="string">
            <text:p>近藤勇</text:p>
          </table:table-cell>
          <table:table-cell office:value-type="string" calcext:value-type="string">
            <text:p>こんどういさみ</text:p>
          </table:table-cell>
          <table:table-cell office:value-type="string" calcext:value-type="string">
            <text:p>第３弾ブースターパック</text:p>
          </table:table-cell>
          <table:table-cell table:formula="of:=VLOOKUP([.G275];[$収録番号.$A$1:$収録番号.$B$9];2;0)" office:value-type="float" office:value="35" calcext:value-type="float">
            <text:p>35</text:p>
          </table:table-cell>
          <table:table-cell office:value-type="string" calcext:value-type="string">
            <text:p>N</text:p>
          </table:table-cell>
          <table:table-cell table:formula="of:=VLOOKUP([.I275];[$レアリティ番号.$A$1:$レアリティ番号.$B$4];2;0)" office:value-type="float" office:value="1" calcext:value-type="float">
            <text:p>1</text:p>
          </table:table-cell>
          <table:table-cell office:value-type="string" calcext:value-type="string">
            <text:p>イジン</text:p>
          </table:table-cell>
          <table:table-cell table:formula="of:=VLOOKUP([.K275];[$種類番号.$A$1:$種類番号.$B$4];2;0)" office:value-type="float" office:value="1" calcext:value-type="float">
            <text:p>1</text:p>
          </table:table-cell>
          <table:table-cell office:value-type="string" calcext:value-type="string">
            <text:p>紫</text:p>
          </table:table-cell>
          <table:table-cell table:formula="of:=VLOOKUP([.M275];[$色番号.$A$1:$色番号.$B$10];2;0)" office:value-type="float" office:value="16" calcext:value-type="float">
            <text:p>16</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75];[$能力語番号.$A$1:$能力語番号.$B$10];2;0);0)" office:value-type="float" office:value="0" calcext:value-type="float">
            <text:p>0</text:p>
          </table:table-cell>
          <table:table-cell office:value-type="string" calcext:value-type="string">
            <text:p>志願</text:p>
          </table:table-cell>
          <table:table-cell table:formula="of:=IFERROR(VLOOKUP([.$S275];[$特性番号.$A$1:$特性番号.$B$8];2;0);0)" office:value-type="float" office:value="32" calcext:value-type="float">
            <text:p>32</text:p>
          </table:table-cell>
          <table:table-cell office:value-type="string" calcext:value-type="string">
            <text:p>戦場に置かれたときに発動できる。自分の戦場のガーディアンすべてを墓地に置く。¶自分の戦場にガーディアンがいない間「即応 ダブルプレッシャー」と「特性：剣術」を得る。</text:p>
          </table:table-cell>
          <table:table-cell table:style-name="ce8" table:formula="of:=NA()" office:value-type="string" office:string-value="" calcext:value-type="error">
            <text:p>#N/A</text:p>
          </table:table-cell>
          <table:table-cell table:formula="of:=IFERROR(VLOOKUP([.$V275];[$遺業能力番号.$A$1:$遺業能力番号.$B$9];2;0);0)" office:value-type="float" office:value="0" calcext:value-type="float">
            <text:p>0</text:p>
          </table:table-cell>
          <table:table-cell office:value-type="string" calcext:value-type="string">
            <text:p>https://one-draw.jp/ijinden/cardlist/003/card/03_046.png</text:p>
          </table:table-cell>
          <table:table-cell table:formula="of:=CONCATENATE([$JSON.$A$1];[.$C275];[$JSON.$B$1];[.$E275];[$JSON.$C$1];[.$F275];[$JSON.$D$1];IF(ISNA([.$S275]);&quot;null&quot;;&quot;&quot;&quot;&quot;&amp;[.$S275]&amp;&quot;&quot;&quot;&quot;);[$JSON.$E$1];[.$U275];[$JSON.$F$1];IF(ISNA([.$V275]);&quot;null&quot;;&quot;&quot;&quot;&quot;&amp;[.$V275]&amp;&quot;&quot;&quot;&quot;);[$JSON.$G$1];[.$X275];[$JSON.$H$1];[.$H275];[$JSON.$I$1];[.J275];[$JSON.$J$1];[.$L275];[$JSON.$K$1];[.$O275];[$JSON.$L$1];[.$N275];[$JSON.$M$1];[.$R275];[$JSON.$N$1];[.$T275];[$JSON.$O$1];[.$W275];[$JSON.$P$1];[.$A275];[$JSON.$Q$1];[.$B275];[$JSON.$R$1])" office:value-type="string" office:string-value="{&quot;id&quot;:&quot;3-46&quot;,&quot;name&quot;:&quot;近藤勇&quot;,&quot;kana&quot;:&quot;こんどういさみ&quot;,&quot;traitText&quot;:&quot;志願&quot;,&quot;ruleText&quot;:&quot;戦場に置かれたときに発動できる。自分の戦場のガーディアンすべてを墓地に置く。¶自分の戦場にガーディアンがいない間「即応 ダブルプレッシャー」と「特性：剣術」を得る。&quot;,&quot;legacyText&quot;:null,&quot;imageUrl&quot;:&quot;https://one-draw.jp/ijinden/cardlist/003/card/03_046.png&quot;,&quot;expansion&quot;:35,&quot;rarity&quot;:1,&quot;type&quot;:1,&quot;level&quot;:7,&quot;color&quot;:16,&quot;term&quot;:0,&quot;trait&quot;:32,&quot;legacy&quot;:0,&quot;orderTable&quot;:274,&quot;orderDeck&quot;:218}," calcext:value-type="string">
            <text:p>{"id":"3-46","name":"近藤勇","kana":"こんどういさみ","traitText":"志願","ruleText":"戦場に置かれたときに発動できる。自分の戦場のガーディアンすべてを墓地に置く。¶自分の戦場にガーディアンがいない間「即応 ダブルプレッシャー」と「特性：剣術」を得る。","legacyText":null,"imageUrl":"https://one-draw.jp/ijinden/cardlist/003/card/03_046.png","expansion":35,"rarity":1,"type":1,"level":7,"color":16,"term":0,"trait":32,"legacy":0,"orderTable":274,"orderDeck":218},</text:p>
          </table:table-cell>
          <table:table-cell table:number-columns-repeated="16347"/>
        </table:table-row>
        <table:table-row table:style-name="ro2">
          <table:table-cell office:value-type="float" office:value="275" calcext:value-type="float">
            <text:p>275</text:p>
          </table:table-cell>
          <table:table-cell office:value-type="float" office:value="22" calcext:value-type="float">
            <text:p>22</text:p>
          </table:table-cell>
          <table:table-cell office:value-type="string" calcext:value-type="string">
            <text:p>3-47</text:p>
          </table:table-cell>
          <table:table-cell office:value-type="float" office:value="47" calcext:value-type="float">
            <text:p>47</text:p>
          </table:table-cell>
          <table:table-cell office:value-type="string" calcext:value-type="string">
            <text:p>徳川慶喜</text:p>
          </table:table-cell>
          <table:table-cell office:value-type="string" calcext:value-type="string">
            <text:p>とくがわよしのぶ</text:p>
          </table:table-cell>
          <table:table-cell office:value-type="string" calcext:value-type="string">
            <text:p>第３弾ブースターパック</text:p>
          </table:table-cell>
          <table:table-cell table:formula="of:=VLOOKUP([.G276];[$収録番号.$A$1:$収録番号.$B$9];2;0)" office:value-type="float" office:value="35" calcext:value-type="float">
            <text:p>35</text:p>
          </table:table-cell>
          <table:table-cell office:value-type="string" calcext:value-type="string">
            <text:p>N</text:p>
          </table:table-cell>
          <table:table-cell table:formula="of:=VLOOKUP([.I276];[$レアリティ番号.$A$1:$レアリティ番号.$B$4];2;0)" office:value-type="float" office:value="1" calcext:value-type="float">
            <text:p>1</text:p>
          </table:table-cell>
          <table:table-cell office:value-type="string" calcext:value-type="string">
            <text:p>イジン</text:p>
          </table:table-cell>
          <table:table-cell table:formula="of:=VLOOKUP([.K276];[$種類番号.$A$1:$種類番号.$B$4];2;0)" office:value-type="float" office:value="1" calcext:value-type="float">
            <text:p>1</text:p>
          </table:table-cell>
          <table:table-cell office:value-type="string" calcext:value-type="string">
            <text:p>紫</text:p>
          </table:table-cell>
          <table:table-cell table:formula="of:=VLOOKUP([.M276];[$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7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76];[$特性番号.$A$1:$特性番号.$B$8];2;0);0)" office:value-type="float" office:value="0" calcext:value-type="float">
            <text:p>0</text:p>
          </table:table-cell>
          <table:table-cell office:value-type="string" calcext:value-type="string">
            <text:p>戦場の能力によって相手がドローしたとき、相手の手札のカード1つを墓地に置く。そのカードは相手が選ぶ。</text:p>
          </table:table-cell>
          <table:table-cell table:style-name="ce8" table:formula="of:=NA()" office:value-type="string" office:string-value="" calcext:value-type="error">
            <text:p>#N/A</text:p>
          </table:table-cell>
          <table:table-cell table:formula="of:=IFERROR(VLOOKUP([.$V276];[$遺業能力番号.$A$1:$遺業能力番号.$B$9];2;0);0)" office:value-type="float" office:value="0" calcext:value-type="float">
            <text:p>0</text:p>
          </table:table-cell>
          <table:table-cell office:value-type="string" calcext:value-type="string">
            <text:p>https://one-draw.jp/ijinden/cardlist/003/card/03_047.png</text:p>
          </table:table-cell>
          <table:table-cell table:formula="of:=CONCATENATE([$JSON.$A$1];[.$C276];[$JSON.$B$1];[.$E276];[$JSON.$C$1];[.$F276];[$JSON.$D$1];IF(ISNA([.$S276]);&quot;null&quot;;&quot;&quot;&quot;&quot;&amp;[.$S276]&amp;&quot;&quot;&quot;&quot;);[$JSON.$E$1];[.$U276];[$JSON.$F$1];IF(ISNA([.$V276]);&quot;null&quot;;&quot;&quot;&quot;&quot;&amp;[.$V276]&amp;&quot;&quot;&quot;&quot;);[$JSON.$G$1];[.$X276];[$JSON.$H$1];[.$H276];[$JSON.$I$1];[.J276];[$JSON.$J$1];[.$L276];[$JSON.$K$1];[.$O276];[$JSON.$L$1];[.$N276];[$JSON.$M$1];[.$R276];[$JSON.$N$1];[.$T276];[$JSON.$O$1];[.$W276];[$JSON.$P$1];[.$A276];[$JSON.$Q$1];[.$B276];[$JSON.$R$1])" office:value-type="string" office:string-value="{&quot;id&quot;:&quot;3-47&quot;,&quot;name&quot;:&quot;徳川慶喜&quot;,&quot;kana&quot;:&quot;とくがわよしのぶ&quot;,&quot;traitText&quot;:null,&quot;ruleText&quot;:&quot;戦場の能力によって相手がドローしたとき、相手の手札のカード1つを墓地に置く。そのカードは相手が選ぶ。&quot;,&quot;legacyText&quot;:null,&quot;imageUrl&quot;:&quot;https://one-draw.jp/ijinden/cardlist/003/card/03_047.png&quot;,&quot;expansion&quot;:35,&quot;rarity&quot;:1,&quot;type&quot;:1,&quot;level&quot;:1,&quot;color&quot;:16,&quot;term&quot;:0,&quot;trait&quot;:0,&quot;legacy&quot;:0,&quot;orderTable&quot;:275,&quot;orderDeck&quot;:22}," calcext:value-type="string">
            <text:p>{"id":"3-47","name":"徳川慶喜","kana":"とくがわよしのぶ","traitText":null,"ruleText":"戦場の能力によって相手がドローしたとき、相手の手札のカード1つを墓地に置く。そのカードは相手が選ぶ。","legacyText":null,"imageUrl":"https://one-draw.jp/ijinden/cardlist/003/card/03_047.png","expansion":35,"rarity":1,"type":1,"level":1,"color":16,"term":0,"trait":0,"legacy":0,"orderTable":275,"orderDeck":22},</text:p>
          </table:table-cell>
          <table:table-cell table:number-columns-repeated="16347"/>
        </table:table-row>
        <table:table-row table:style-name="ro2">
          <table:table-cell office:value-type="float" office:value="276" calcext:value-type="float">
            <text:p>276</text:p>
          </table:table-cell>
          <table:table-cell office:value-type="float" office:value="142" calcext:value-type="float">
            <text:p>142</text:p>
          </table:table-cell>
          <table:table-cell office:value-type="string" calcext:value-type="string">
            <text:p>3-48</text:p>
          </table:table-cell>
          <table:table-cell office:value-type="float" office:value="48" calcext:value-type="float">
            <text:p>48</text:p>
          </table:table-cell>
          <table:table-cell office:value-type="string" calcext:value-type="string">
            <text:p>マシュー・カルブレイス・ペリー</text:p>
          </table:table-cell>
          <table:table-cell office:value-type="string" calcext:value-type="string">
            <text:p>ましゅーかるぶれいすぺりー</text:p>
          </table:table-cell>
          <table:table-cell office:value-type="string" calcext:value-type="string">
            <text:p>第３弾ブースターパック</text:p>
          </table:table-cell>
          <table:table-cell table:formula="of:=VLOOKUP([.G277];[$収録番号.$A$1:$収録番号.$B$9];2;0)" office:value-type="float" office:value="35" calcext:value-type="float">
            <text:p>35</text:p>
          </table:table-cell>
          <table:table-cell office:value-type="string" calcext:value-type="string">
            <text:p>R</text:p>
          </table:table-cell>
          <table:table-cell table:formula="of:=VLOOKUP([.I277];[$レアリティ番号.$A$1:$レアリティ番号.$B$4];2;0)" office:value-type="float" office:value="2" calcext:value-type="float">
            <text:p>2</text:p>
          </table:table-cell>
          <table:table-cell office:value-type="string" calcext:value-type="string">
            <text:p>イジン</text:p>
          </table:table-cell>
          <table:table-cell table:formula="of:=VLOOKUP([.K277];[$種類番号.$A$1:$種類番号.$B$4];2;0)" office:value-type="float" office:value="1" calcext:value-type="float">
            <text:p>1</text:p>
          </table:table-cell>
          <table:table-cell office:value-type="string" calcext:value-type="string">
            <text:p>紫</text:p>
          </table:table-cell>
          <table:table-cell table:formula="of:=VLOOKUP([.M277];[$色番号.$A$1:$色番号.$B$10];2;0)" office:value-type="float" office:value="16" calcext:value-type="float">
            <text:p>16</text:p>
          </table:table-cell>
          <table:table-cell office:value-type="float" office:value="4" calcext:value-type="float">
            <text:p>4</text:p>
          </table:table-cell>
          <table:table-cell table:formula="of:=NA()" office:value-type="string" office:string-value="" calcext:value-type="error">
            <text:p>#N/A</text:p>
          </table:table-cell>
          <table:table-cell office:value-type="string" calcext:value-type="string">
            <text:p>航海</text:p>
          </table:table-cell>
          <table:table-cell table:formula="of:=IFERROR(VLOOKUP([.$Q277];[$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277];[$特性番号.$A$1:$特性番号.$B$8];2;0);0)" office:value-type="float" office:value="0" calcext:value-type="float">
            <text:p>0</text:p>
          </table:table-cell>
          <table:table-cell office:value-type="string" calcext:value-type="string">
            <text:p>手札から墓地に置かれたとき、これを戦場に置く。¶航海 - アタッカーになったとき、戦場か魔力ゾーンの裏のカード1つか2つを指定して発動できる。それらのカードの表を見る。</text:p>
          </table:table-cell>
          <table:table-cell table:style-name="ce8" table:formula="of:=NA()" office:value-type="string" office:string-value="" calcext:value-type="error">
            <text:p>#N/A</text:p>
          </table:table-cell>
          <table:table-cell table:formula="of:=IFERROR(VLOOKUP([.$V277];[$遺業能力番号.$A$1:$遺業能力番号.$B$9];2;0);0)" office:value-type="float" office:value="0" calcext:value-type="float">
            <text:p>0</text:p>
          </table:table-cell>
          <table:table-cell office:value-type="string" calcext:value-type="string">
            <text:p>https://one-draw.jp/ijinden/cardlist/003/card/03_048.png</text:p>
          </table:table-cell>
          <table:table-cell table:formula="of:=CONCATENATE([$JSON.$A$1];[.$C277];[$JSON.$B$1];[.$E277];[$JSON.$C$1];[.$F277];[$JSON.$D$1];IF(ISNA([.$S277]);&quot;null&quot;;&quot;&quot;&quot;&quot;&amp;[.$S277]&amp;&quot;&quot;&quot;&quot;);[$JSON.$E$1];[.$U277];[$JSON.$F$1];IF(ISNA([.$V277]);&quot;null&quot;;&quot;&quot;&quot;&quot;&amp;[.$V277]&amp;&quot;&quot;&quot;&quot;);[$JSON.$G$1];[.$X277];[$JSON.$H$1];[.$H277];[$JSON.$I$1];[.J277];[$JSON.$J$1];[.$L277];[$JSON.$K$1];[.$O277];[$JSON.$L$1];[.$N277];[$JSON.$M$1];[.$R277];[$JSON.$N$1];[.$T277];[$JSON.$O$1];[.$W277];[$JSON.$P$1];[.$A277];[$JSON.$Q$1];[.$B277];[$JSON.$R$1])" office:value-type="string" office:string-value="{&quot;id&quot;:&quot;3-48&quot;,&quot;name&quot;:&quot;マシュー・カルブレイス・ペリー&quot;,&quot;kana&quot;:&quot;ましゅーかるぶれいすぺりー&quot;,&quot;traitText&quot;:null,&quot;ruleText&quot;:&quot;手札から墓地に置かれたとき、これを戦場に置く。¶航海 - アタッカーになったとき、戦場か魔力ゾーンの裏のカード1つか2つを指定して発動できる。それらのカードの表を見る。&quot;,&quot;legacyText&quot;:null,&quot;imageUrl&quot;:&quot;https://one-draw.jp/ijinden/cardlist/003/card/03_048.png&quot;,&quot;expansion&quot;:35,&quot;rarity&quot;:2,&quot;type&quot;:1,&quot;level&quot;:4,&quot;color&quot;:16,&quot;term&quot;:1,&quot;trait&quot;:0,&quot;legacy&quot;:0,&quot;orderTable&quot;:276,&quot;orderDeck&quot;:142}," calcext:value-type="string">
            <text:p>{"id":"3-48","name":"マシュー・カルブレイス・ペリー","kana":"ましゅーかるぶれいすぺりー","traitText":null,"ruleText":"手札から墓地に置かれたとき、これを戦場に置く。¶航海 - アタッカーになったとき、戦場か魔力ゾーンの裏のカード1つか2つを指定して発動できる。それらのカードの表を見る。","legacyText":null,"imageUrl":"https://one-draw.jp/ijinden/cardlist/003/card/03_048.png","expansion":35,"rarity":2,"type":1,"level":4,"color":16,"term":1,"trait":0,"legacy":0,"orderTable":276,"orderDeck":142},</text:p>
          </table:table-cell>
          <table:table-cell table:number-columns-repeated="16347"/>
        </table:table-row>
        <table:table-row table:style-name="ro2">
          <table:table-cell office:value-type="float" office:value="277" calcext:value-type="float">
            <text:p>277</text:p>
          </table:table-cell>
          <table:table-cell office:value-type="float" office:value="228" calcext:value-type="float">
            <text:p>228</text:p>
          </table:table-cell>
          <table:table-cell office:value-type="string" calcext:value-type="string">
            <text:p>3-49</text:p>
          </table:table-cell>
          <table:table-cell office:value-type="float" office:value="49" calcext:value-type="float">
            <text:p>49</text:p>
          </table:table-cell>
          <table:table-cell office:value-type="string" calcext:value-type="string">
            <text:p>タウンゼント・ハリス</text:p>
          </table:table-cell>
          <table:table-cell office:value-type="string" calcext:value-type="string">
            <text:p>たうんぜんとはりす</text:p>
          </table:table-cell>
          <table:table-cell office:value-type="string" calcext:value-type="string">
            <text:p>第３弾ブースターパック</text:p>
          </table:table-cell>
          <table:table-cell table:formula="of:=VLOOKUP([.G278];[$収録番号.$A$1:$収録番号.$B$9];2;0)" office:value-type="float" office:value="35" calcext:value-type="float">
            <text:p>35</text:p>
          </table:table-cell>
          <table:table-cell office:value-type="string" calcext:value-type="string">
            <text:p>N</text:p>
          </table:table-cell>
          <table:table-cell table:formula="of:=VLOOKUP([.I278];[$レアリティ番号.$A$1:$レアリティ番号.$B$4];2;0)" office:value-type="float" office:value="1" calcext:value-type="float">
            <text:p>1</text:p>
          </table:table-cell>
          <table:table-cell office:value-type="string" calcext:value-type="string">
            <text:p>イジン</text:p>
          </table:table-cell>
          <table:table-cell table:formula="of:=VLOOKUP([.K278];[$種類番号.$A$1:$種類番号.$B$4];2;0)" office:value-type="float" office:value="1" calcext:value-type="float">
            <text:p>1</text:p>
          </table:table-cell>
          <table:table-cell office:value-type="string" calcext:value-type="string">
            <text:p>紫</text:p>
          </table:table-cell>
          <table:table-cell table:formula="of:=VLOOKUP([.M278];[$色番号.$A$1:$色番号.$B$10];2;0)" office:value-type="float" office:value="16" calcext:value-type="float">
            <text:p>16</text:p>
          </table:table-cell>
          <table:table-cell office:value-type="float" office:value="8" calcext:value-type="float">
            <text:p>8</text:p>
          </table:table-cell>
          <table:table-cell table:formula="of:=NA()" office:value-type="string" office:string-value="" calcext:value-type="error">
            <text:p>#N/A</text:p>
          </table:table-cell>
          <table:table-cell office:value-type="string" calcext:value-type="string">
            <text:p>航海</text:p>
          </table:table-cell>
          <table:table-cell table:formula="of:=IFERROR(VLOOKUP([.$Q278];[$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278];[$特性番号.$A$1:$特性番号.$B$8];2;0);0)" office:value-type="float" office:value="0" calcext:value-type="float">
            <text:p>0</text:p>
          </table:table-cell>
          <table:table-cell office:value-type="string" calcext:value-type="string">
            <text:p>航海 - 「戦場に置かれたとき」か「アタッカーになったとき」に発動できる。自分の戦場のガーディアン1体を手札に戻す。自分の山札の上から1枚をガーディアンとして戦場に置いてもよい。</text:p>
          </table:table-cell>
          <table:table-cell table:style-name="ce8" table:formula="of:=NA()" office:value-type="string" office:string-value="" calcext:value-type="error">
            <text:p>#N/A</text:p>
          </table:table-cell>
          <table:table-cell table:formula="of:=IFERROR(VLOOKUP([.$V278];[$遺業能力番号.$A$1:$遺業能力番号.$B$9];2;0);0)" office:value-type="float" office:value="0" calcext:value-type="float">
            <text:p>0</text:p>
          </table:table-cell>
          <table:table-cell office:value-type="string" calcext:value-type="string">
            <text:p>https://one-draw.jp/ijinden/cardlist/003/card/03_049.png</text:p>
          </table:table-cell>
          <table:table-cell table:formula="of:=CONCATENATE([$JSON.$A$1];[.$C278];[$JSON.$B$1];[.$E278];[$JSON.$C$1];[.$F278];[$JSON.$D$1];IF(ISNA([.$S278]);&quot;null&quot;;&quot;&quot;&quot;&quot;&amp;[.$S278]&amp;&quot;&quot;&quot;&quot;);[$JSON.$E$1];[.$U278];[$JSON.$F$1];IF(ISNA([.$V278]);&quot;null&quot;;&quot;&quot;&quot;&quot;&amp;[.$V278]&amp;&quot;&quot;&quot;&quot;);[$JSON.$G$1];[.$X278];[$JSON.$H$1];[.$H278];[$JSON.$I$1];[.J278];[$JSON.$J$1];[.$L278];[$JSON.$K$1];[.$O278];[$JSON.$L$1];[.$N278];[$JSON.$M$1];[.$R278];[$JSON.$N$1];[.$T278];[$JSON.$O$1];[.$W278];[$JSON.$P$1];[.$A278];[$JSON.$Q$1];[.$B278];[$JSON.$R$1])" office:value-type="string" office:string-value="{&quot;id&quot;:&quot;3-49&quot;,&quot;name&quot;:&quot;タウンゼント・ハリス&quot;,&quot;kana&quot;:&quot;たうんぜんとはりす&quot;,&quot;traitText&quot;:null,&quot;ruleText&quot;:&quot;航海 - 「戦場に置かれたとき」か「アタッカーになったとき」に発動できる。自分の戦場のガーディアン1体を手札に戻す。自分の山札の上から1枚をガーディアンとして戦場に置いてもよい。&quot;,&quot;legacyText&quot;:null,&quot;imageUrl&quot;:&quot;https://one-draw.jp/ijinden/cardlist/003/card/03_049.png&quot;,&quot;expansion&quot;:35,&quot;rarity&quot;:1,&quot;type&quot;:1,&quot;level&quot;:8,&quot;color&quot;:16,&quot;term&quot;:1,&quot;trait&quot;:0,&quot;legacy&quot;:0,&quot;orderTable&quot;:277,&quot;orderDeck&quot;:228}," calcext:value-type="string">
            <text:p>{"id":"3-49","name":"タウンゼント・ハリス","kana":"たうんぜんとはりす","traitText":null,"ruleText":"航海 - 「戦場に置かれたとき」か「アタッカーになったとき」に発動できる。自分の戦場のガーディアン1体を手札に戻す。自分の山札の上から1枚をガーディアンとして戦場に置いてもよい。","legacyText":null,"imageUrl":"https://one-draw.jp/ijinden/cardlist/003/card/03_049.png","expansion":35,"rarity":1,"type":1,"level":8,"color":16,"term":1,"trait":0,"legacy":0,"orderTable":277,"orderDeck":228},</text:p>
          </table:table-cell>
          <table:table-cell table:number-columns-repeated="16347"/>
        </table:table-row>
        <table:table-row table:style-name="ro2">
          <table:table-cell office:value-type="float" office:value="278" calcext:value-type="float">
            <text:p>278</text:p>
          </table:table-cell>
          <table:table-cell office:value-type="float" office:value="104" calcext:value-type="float">
            <text:p>104</text:p>
          </table:table-cell>
          <table:table-cell office:value-type="string" calcext:value-type="string">
            <text:p>3-50</text:p>
          </table:table-cell>
          <table:table-cell office:value-type="float" office:value="50" calcext:value-type="float">
            <text:p>50</text:p>
          </table:table-cell>
          <table:table-cell office:value-type="string" calcext:value-type="string">
            <text:p>勝海舟</text:p>
          </table:table-cell>
          <table:table-cell office:value-type="string" calcext:value-type="string">
            <text:p>かつかいしゅう</text:p>
          </table:table-cell>
          <table:table-cell office:value-type="string" calcext:value-type="string">
            <text:p>第３弾ブースターパック</text:p>
          </table:table-cell>
          <table:table-cell table:formula="of:=VLOOKUP([.G279];[$収録番号.$A$1:$収録番号.$B$9];2;0)" office:value-type="float" office:value="35" calcext:value-type="float">
            <text:p>35</text:p>
          </table:table-cell>
          <table:table-cell office:value-type="string" calcext:value-type="string">
            <text:p>N</text:p>
          </table:table-cell>
          <table:table-cell table:formula="of:=VLOOKUP([.I279];[$レアリティ番号.$A$1:$レアリティ番号.$B$4];2;0)" office:value-type="float" office:value="1" calcext:value-type="float">
            <text:p>1</text:p>
          </table:table-cell>
          <table:table-cell office:value-type="string" calcext:value-type="string">
            <text:p>イジン</text:p>
          </table:table-cell>
          <table:table-cell table:formula="of:=VLOOKUP([.K279];[$種類番号.$A$1:$種類番号.$B$4];2;0)" office:value-type="float" office:value="1" calcext:value-type="float">
            <text:p>1</text:p>
          </table:table-cell>
          <table:table-cell office:value-type="string" calcext:value-type="string">
            <text:p>紫</text:p>
          </table:table-cell>
          <table:table-cell table:formula="of:=VLOOKUP([.M279];[$色番号.$A$1:$色番号.$B$10];2;0)" office:value-type="float" office:value="16" calcext:value-type="float">
            <text:p>16</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7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79];[$特性番号.$A$1:$特性番号.$B$8];2;0);0)" office:value-type="float" office:value="0" calcext:value-type="float">
            <text:p>0</text:p>
          </table:table-cell>
          <table:table-cell office:value-type="string" calcext:value-type="string">
            <text:p>ウォッチャー¶相手のターンのブロックステップが開始したとき、自分の戦場の「志願」イジンかガーディアン1体を指定して発動できる。そのイジンかガーディアンと、これを破壊する。その後バトルを中断する。相手は残りのフェイズを行わずにターンを終了する。</text:p>
          </table:table-cell>
          <table:table-cell table:style-name="ce8" office:value-type="string" calcext:value-type="string">
            <text:p>魔力化</text:p>
          </table:table-cell>
          <table:table-cell table:formula="of:=IFERROR(VLOOKUP([.$V279];[$遺業能力番号.$A$1:$遺業能力番号.$B$9];2;0);0)" office:value-type="float" office:value="1" calcext:value-type="float">
            <text:p>1</text:p>
          </table:table-cell>
          <table:table-cell office:value-type="string" calcext:value-type="string">
            <text:p>https://one-draw.jp/ijinden/cardlist/003/card/03_050.png</text:p>
          </table:table-cell>
          <table:table-cell table:formula="of:=CONCATENATE([$JSON.$A$1];[.$C279];[$JSON.$B$1];[.$E279];[$JSON.$C$1];[.$F279];[$JSON.$D$1];IF(ISNA([.$S279]);&quot;null&quot;;&quot;&quot;&quot;&quot;&amp;[.$S279]&amp;&quot;&quot;&quot;&quot;);[$JSON.$E$1];[.$U279];[$JSON.$F$1];IF(ISNA([.$V279]);&quot;null&quot;;&quot;&quot;&quot;&quot;&amp;[.$V279]&amp;&quot;&quot;&quot;&quot;);[$JSON.$G$1];[.$X279];[$JSON.$H$1];[.$H279];[$JSON.$I$1];[.J279];[$JSON.$J$1];[.$L279];[$JSON.$K$1];[.$O279];[$JSON.$L$1];[.$N279];[$JSON.$M$1];[.$R279];[$JSON.$N$1];[.$T279];[$JSON.$O$1];[.$W279];[$JSON.$P$1];[.$A279];[$JSON.$Q$1];[.$B279];[$JSON.$R$1])" office:value-type="string" office:string-value="{&quot;id&quot;:&quot;3-50&quot;,&quot;name&quot;:&quot;勝海舟&quot;,&quot;kana&quot;:&quot;かつかいしゅう&quot;,&quot;traitText&quot;:null,&quot;ruleText&quot;:&quot;ウォッチャー¶相手のターンのブロックステップが開始したとき、自分の戦場の「志願」イジンかガーディアン1体を指定して発動できる。そのイジンかガーディアンと、これを破壊する。その後バトルを中断する。相手は残りのフェイズを行わずにターンを終了する。&quot;,&quot;legacyText&quot;:&quot;魔力化&quot;,&quot;imageUrl&quot;:&quot;https://one-draw.jp/ijinden/cardlist/003/card/03_050.png&quot;,&quot;expansion&quot;:35,&quot;rarity&quot;:1,&quot;type&quot;:1,&quot;level&quot;:3,&quot;color&quot;:16,&quot;term&quot;:0,&quot;trait&quot;:0,&quot;legacy&quot;:1,&quot;orderTable&quot;:278,&quot;orderDeck&quot;:104}," calcext:value-type="string">
            <text:p>{"id":"3-50","name":"勝海舟","kana":"かつかいしゅう","traitText":null,"ruleText":"ウォッチャー¶相手のターンのブロックステップが開始したとき、自分の戦場の「志願」イジンかガーディアン1体を指定して発動できる。そのイジンかガーディアンと、これを破壊する。その後バトルを中断する。相手は残りのフェイズを行わずにターンを終了する。","legacyText":"魔力化","imageUrl":"https://one-draw.jp/ijinden/cardlist/003/card/03_050.png","expansion":35,"rarity":1,"type":1,"level":3,"color":16,"term":0,"trait":0,"legacy":1,"orderTable":278,"orderDeck":104},</text:p>
          </table:table-cell>
          <table:table-cell table:number-columns-repeated="16347"/>
        </table:table-row>
        <table:table-row table:style-name="ro2">
          <table:table-cell office:value-type="float" office:value="279" calcext:value-type="float">
            <text:p>279</text:p>
          </table:table-cell>
          <table:table-cell office:value-type="float" office:value="249" calcext:value-type="float">
            <text:p>249</text:p>
          </table:table-cell>
          <table:table-cell office:value-type="string" calcext:value-type="string">
            <text:p>3-51</text:p>
          </table:table-cell>
          <table:table-cell office:value-type="float" office:value="51" calcext:value-type="float">
            <text:p>51</text:p>
          </table:table-cell>
          <table:table-cell office:value-type="string" calcext:value-type="string">
            <text:p>炎上がる天守閣</text:p>
          </table:table-cell>
          <table:table-cell office:value-type="string" calcext:value-type="string">
            <text:p>ほのおあがるてんしゅかく</text:p>
          </table:table-cell>
          <table:table-cell office:value-type="string" calcext:value-type="string">
            <text:p>第３弾ブースターパック</text:p>
          </table:table-cell>
          <table:table-cell table:formula="of:=VLOOKUP([.G280];[$収録番号.$A$1:$収録番号.$B$9];2;0)" office:value-type="float" office:value="35" calcext:value-type="float">
            <text:p>35</text:p>
          </table:table-cell>
          <table:table-cell office:value-type="string" calcext:value-type="string">
            <text:p>N</text:p>
          </table:table-cell>
          <table:table-cell table:formula="of:=VLOOKUP([.I280];[$レアリティ番号.$A$1:$レアリティ番号.$B$4];2;0)" office:value-type="float" office:value="1" calcext:value-type="float">
            <text:p>1</text:p>
          </table:table-cell>
          <table:table-cell office:value-type="string" calcext:value-type="string">
            <text:p>ハイケイ</text:p>
          </table:table-cell>
          <table:table-cell table:formula="of:=VLOOKUP([.K280];[$種類番号.$A$1:$種類番号.$B$4];2;0)" office:value-type="float" office:value="2" calcext:value-type="float">
            <text:p>2</text:p>
          </table:table-cell>
          <table:table-cell office:value-type="string" calcext:value-type="string">
            <text:p>赤</text:p>
          </table:table-cell>
          <table:table-cell table:formula="of:=VLOOKUP([.M280];[$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8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80];[$特性番号.$A$1:$特性番号.$B$8];2;0);0)" office:value-type="float" office:value="0" calcext:value-type="float">
            <text:p>0</text:p>
          </table:table-cell>
          <table:table-cell office:value-type="string" calcext:value-type="string">
            <text:p>これが戦場にある間、自分の戦場の『アタック+』能力を持つイジンと、自分の戦場のガーディアンは「戦場の能力によって戦場を離れない」を得る。¶破壊されたとき、3ドローする。</text:p>
          </table:table-cell>
          <table:table-cell table:style-name="ce8" table:formula="of:=NA()" office:value-type="string" office:string-value="" calcext:value-type="error">
            <text:p>#N/A</text:p>
          </table:table-cell>
          <table:table-cell table:formula="of:=IFERROR(VLOOKUP([.$V280];[$遺業能力番号.$A$1:$遺業能力番号.$B$9];2;0);0)" office:value-type="float" office:value="0" calcext:value-type="float">
            <text:p>0</text:p>
          </table:table-cell>
          <table:table-cell office:value-type="string" calcext:value-type="string">
            <text:p>https://one-draw.jp/ijinden/cardlist/003/card/03_051.png</text:p>
          </table:table-cell>
          <table:table-cell table:formula="of:=CONCATENATE([$JSON.$A$1];[.$C280];[$JSON.$B$1];[.$E280];[$JSON.$C$1];[.$F280];[$JSON.$D$1];IF(ISNA([.$S280]);&quot;null&quot;;&quot;&quot;&quot;&quot;&amp;[.$S280]&amp;&quot;&quot;&quot;&quot;);[$JSON.$E$1];[.$U280];[$JSON.$F$1];IF(ISNA([.$V280]);&quot;null&quot;;&quot;&quot;&quot;&quot;&amp;[.$V280]&amp;&quot;&quot;&quot;&quot;);[$JSON.$G$1];[.$X280];[$JSON.$H$1];[.$H280];[$JSON.$I$1];[.J280];[$JSON.$J$1];[.$L280];[$JSON.$K$1];[.$O280];[$JSON.$L$1];[.$N280];[$JSON.$M$1];[.$R280];[$JSON.$N$1];[.$T280];[$JSON.$O$1];[.$W280];[$JSON.$P$1];[.$A280];[$JSON.$Q$1];[.$B280];[$JSON.$R$1])" office:value-type="string" office:string-value="{&quot;id&quot;:&quot;3-51&quot;,&quot;name&quot;:&quot;炎上がる天守閣&quot;,&quot;kana&quot;:&quot;ほのおあがるてんしゅかく&quot;,&quot;traitText&quot;:null,&quot;ruleText&quot;:&quot;これが戦場にある間、自分の戦場の『アタック+』能力を持つイジンと、自分の戦場のガーディアンは「戦場の能力によって戦場を離れない」を得る。¶破壊されたとき、3ドローする。&quot;,&quot;legacyText&quot;:null,&quot;imageUrl&quot;:&quot;https://one-draw.jp/ijinden/cardlist/003/card/03_051.png&quot;,&quot;expansion&quot;:35,&quot;rarity&quot;:1,&quot;type&quot;:2,&quot;level&quot;:3,&quot;color&quot;:1,&quot;term&quot;:0,&quot;trait&quot;:0,&quot;legacy&quot;:0,&quot;orderTable&quot;:279,&quot;orderDeck&quot;:249}," calcext:value-type="string">
            <text:p>{"id":"3-51","name":"炎上がる天守閣","kana":"ほのおあがるてんしゅかく","traitText":null,"ruleText":"これが戦場にある間、自分の戦場の『アタック+』能力を持つイジンと、自分の戦場のガーディアンは「戦場の能力によって戦場を離れない」を得る。¶破壊されたとき、3ドローする。","legacyText":null,"imageUrl":"https://one-draw.jp/ijinden/cardlist/003/card/03_051.png","expansion":35,"rarity":1,"type":2,"level":3,"color":1,"term":0,"trait":0,"legacy":0,"orderTable":279,"orderDeck":249},</text:p>
          </table:table-cell>
          <table:table-cell table:number-columns-repeated="16347"/>
        </table:table-row>
        <table:table-row table:style-name="ro2">
          <table:table-cell office:value-type="float" office:value="280" calcext:value-type="float">
            <text:p>280</text:p>
          </table:table-cell>
          <table:table-cell office:value-type="float" office:value="237" calcext:value-type="float">
            <text:p>237</text:p>
          </table:table-cell>
          <table:table-cell office:value-type="string" calcext:value-type="string">
            <text:p>3-52</text:p>
          </table:table-cell>
          <table:table-cell office:value-type="float" office:value="52" calcext:value-type="float">
            <text:p>52</text:p>
          </table:table-cell>
          <table:table-cell office:value-type="string" calcext:value-type="string">
            <text:p>天下分け目の主戦場</text:p>
          </table:table-cell>
          <table:table-cell office:value-type="string" calcext:value-type="string">
            <text:p>てんかわけめのしゅせんじょう</text:p>
          </table:table-cell>
          <table:table-cell office:value-type="string" calcext:value-type="string">
            <text:p>第３弾ブースターパック</text:p>
          </table:table-cell>
          <table:table-cell table:formula="of:=VLOOKUP([.G281];[$収録番号.$A$1:$収録番号.$B$9];2;0)" office:value-type="float" office:value="35" calcext:value-type="float">
            <text:p>35</text:p>
          </table:table-cell>
          <table:table-cell office:value-type="string" calcext:value-type="string">
            <text:p>N</text:p>
          </table:table-cell>
          <table:table-cell table:formula="of:=VLOOKUP([.I281];[$レアリティ番号.$A$1:$レアリティ番号.$B$4];2;0)" office:value-type="float" office:value="1" calcext:value-type="float">
            <text:p>1</text:p>
          </table:table-cell>
          <table:table-cell office:value-type="string" calcext:value-type="string">
            <text:p>ハイケイ</text:p>
          </table:table-cell>
          <table:table-cell table:formula="of:=VLOOKUP([.K281];[$種類番号.$A$1:$種類番号.$B$4];2;0)" office:value-type="float" office:value="2" calcext:value-type="float">
            <text:p>2</text:p>
          </table:table-cell>
          <table:table-cell office:value-type="string" calcext:value-type="string">
            <text:p>赤</text:p>
          </table:table-cell>
          <table:table-cell table:formula="of:=VLOOKUP([.M281];[$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8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81];[$特性番号.$A$1:$特性番号.$B$8];2;0);0)" office:value-type="float" office:value="0" calcext:value-type="float">
            <text:p>0</text:p>
          </table:table-cell>
          <table:table-cell office:value-type="string" calcext:value-type="string">
            <text:p>これが戦場にある間、自分の魔力ゾーンのマリョクは「戦場の能力によって魔力ゾーンを離れない」を得る。¶カードが魔力ゾーンに5つ以上ある間、自分の戦場のイジンは「アタック+2000」を得る。</text:p>
          </table:table-cell>
          <table:table-cell table:style-name="ce8" table:formula="of:=NA()" office:value-type="string" office:string-value="" calcext:value-type="error">
            <text:p>#N/A</text:p>
          </table:table-cell>
          <table:table-cell table:formula="of:=IFERROR(VLOOKUP([.$V281];[$遺業能力番号.$A$1:$遺業能力番号.$B$9];2;0);0)" office:value-type="float" office:value="0" calcext:value-type="float">
            <text:p>0</text:p>
          </table:table-cell>
          <table:table-cell office:value-type="string" calcext:value-type="string">
            <text:p>https://one-draw.jp/ijinden/cardlist/003/card/03_052.png</text:p>
          </table:table-cell>
          <table:table-cell table:formula="of:=CONCATENATE([$JSON.$A$1];[.$C281];[$JSON.$B$1];[.$E281];[$JSON.$C$1];[.$F281];[$JSON.$D$1];IF(ISNA([.$S281]);&quot;null&quot;;&quot;&quot;&quot;&quot;&amp;[.$S281]&amp;&quot;&quot;&quot;&quot;);[$JSON.$E$1];[.$U281];[$JSON.$F$1];IF(ISNA([.$V281]);&quot;null&quot;;&quot;&quot;&quot;&quot;&amp;[.$V281]&amp;&quot;&quot;&quot;&quot;);[$JSON.$G$1];[.$X281];[$JSON.$H$1];[.$H281];[$JSON.$I$1];[.J281];[$JSON.$J$1];[.$L281];[$JSON.$K$1];[.$O281];[$JSON.$L$1];[.$N281];[$JSON.$M$1];[.$R281];[$JSON.$N$1];[.$T281];[$JSON.$O$1];[.$W281];[$JSON.$P$1];[.$A281];[$JSON.$Q$1];[.$B281];[$JSON.$R$1])" office:value-type="string" office:string-value="{&quot;id&quot;:&quot;3-52&quot;,&quot;name&quot;:&quot;天下分け目の主戦場&quot;,&quot;kana&quot;:&quot;てんかわけめのしゅせんじょう&quot;,&quot;traitText&quot;:null,&quot;ruleText&quot;:&quot;これが戦場にある間、自分の魔力ゾーンのマリョクは「戦場の能力によって魔力ゾーンを離れない」を得る。¶カードが魔力ゾーンに5つ以上ある間、自分の戦場のイジンは「アタック+2000」を得る。&quot;,&quot;legacyText&quot;:null,&quot;imageUrl&quot;:&quot;https://one-draw.jp/ijinden/cardlist/003/card/03_052.png&quot;,&quot;expansion&quot;:35,&quot;rarity&quot;:1,&quot;type&quot;:2,&quot;level&quot;:1,&quot;color&quot;:1,&quot;term&quot;:0,&quot;trait&quot;:0,&quot;legacy&quot;:0,&quot;orderTable&quot;:280,&quot;orderDeck&quot;:237}," calcext:value-type="string">
            <text:p>{"id":"3-52","name":"天下分け目の主戦場","kana":"てんかわけめのしゅせんじょう","traitText":null,"ruleText":"これが戦場にある間、自分の魔力ゾーンのマリョクは「戦場の能力によって魔力ゾーンを離れない」を得る。¶カードが魔力ゾーンに5つ以上ある間、自分の戦場のイジンは「アタック+2000」を得る。","legacyText":null,"imageUrl":"https://one-draw.jp/ijinden/cardlist/003/card/03_052.png","expansion":35,"rarity":1,"type":2,"level":1,"color":1,"term":0,"trait":0,"legacy":0,"orderTable":280,"orderDeck":237},</text:p>
          </table:table-cell>
          <table:table-cell table:number-columns-repeated="16347"/>
        </table:table-row>
        <table:table-row table:style-name="ro2">
          <table:table-cell office:value-type="float" office:value="281" calcext:value-type="float">
            <text:p>281</text:p>
          </table:table-cell>
          <table:table-cell office:value-type="float" office:value="262" calcext:value-type="float">
            <text:p>262</text:p>
          </table:table-cell>
          <table:table-cell office:value-type="string" calcext:value-type="string">
            <text:p>3-53</text:p>
          </table:table-cell>
          <table:table-cell office:value-type="float" office:value="53" calcext:value-type="float">
            <text:p>53</text:p>
          </table:table-cell>
          <table:table-cell office:value-type="string" calcext:value-type="string">
            <text:p>永遠の帝都</text:p>
          </table:table-cell>
          <table:table-cell office:value-type="string" calcext:value-type="string">
            <text:p>えいえんのていと</text:p>
          </table:table-cell>
          <table:table-cell office:value-type="string" calcext:value-type="string">
            <text:p>第３弾ブースターパック</text:p>
          </table:table-cell>
          <table:table-cell table:formula="of:=VLOOKUP([.G282];[$収録番号.$A$1:$収録番号.$B$9];2;0)" office:value-type="float" office:value="35" calcext:value-type="float">
            <text:p>35</text:p>
          </table:table-cell>
          <table:table-cell office:value-type="string" calcext:value-type="string">
            <text:p>N</text:p>
          </table:table-cell>
          <table:table-cell table:formula="of:=VLOOKUP([.I282];[$レアリティ番号.$A$1:$レアリティ番号.$B$4];2;0)" office:value-type="float" office:value="1" calcext:value-type="float">
            <text:p>1</text:p>
          </table:table-cell>
          <table:table-cell office:value-type="string" calcext:value-type="string">
            <text:p>ハイケイ</text:p>
          </table:table-cell>
          <table:table-cell table:formula="of:=VLOOKUP([.K282];[$種類番号.$A$1:$種類番号.$B$4];2;0)" office:value-type="float" office:value="2" calcext:value-type="float">
            <text:p>2</text:p>
          </table:table-cell>
          <table:table-cell office:value-type="string" calcext:value-type="string">
            <text:p>青</text:p>
          </table:table-cell>
          <table:table-cell table:formula="of:=VLOOKUP([.M282];[$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8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82];[$特性番号.$A$1:$特性番号.$B$8];2;0);0)" office:value-type="float" office:value="0" calcext:value-type="float">
            <text:p>0</text:p>
          </table:table-cell>
          <table:table-cell office:value-type="string" calcext:value-type="string">
            <text:p>これが戦場にある間、自分の戦場の『ブロック+』能力を持つイジンと、自分の戦場のガーディアンは「能力によって破壊されない」を得る。¶これが戦場にある間、自分の戦場のレベル3以下のイジンは「ブロック+1000」を得る。</text:p>
          </table:table-cell>
          <table:table-cell table:style-name="ce8" table:formula="of:=NA()" office:value-type="string" office:string-value="" calcext:value-type="error">
            <text:p>#N/A</text:p>
          </table:table-cell>
          <table:table-cell table:formula="of:=IFERROR(VLOOKUP([.$V282];[$遺業能力番号.$A$1:$遺業能力番号.$B$9];2;0);0)" office:value-type="float" office:value="0" calcext:value-type="float">
            <text:p>0</text:p>
          </table:table-cell>
          <table:table-cell office:value-type="string" calcext:value-type="string">
            <text:p>https://one-draw.jp/ijinden/cardlist/003/card/03_053.png</text:p>
          </table:table-cell>
          <table:table-cell table:formula="of:=CONCATENATE([$JSON.$A$1];[.$C282];[$JSON.$B$1];[.$E282];[$JSON.$C$1];[.$F282];[$JSON.$D$1];IF(ISNA([.$S282]);&quot;null&quot;;&quot;&quot;&quot;&quot;&amp;[.$S282]&amp;&quot;&quot;&quot;&quot;);[$JSON.$E$1];[.$U282];[$JSON.$F$1];IF(ISNA([.$V282]);&quot;null&quot;;&quot;&quot;&quot;&quot;&amp;[.$V282]&amp;&quot;&quot;&quot;&quot;);[$JSON.$G$1];[.$X282];[$JSON.$H$1];[.$H282];[$JSON.$I$1];[.J282];[$JSON.$J$1];[.$L282];[$JSON.$K$1];[.$O282];[$JSON.$L$1];[.$N282];[$JSON.$M$1];[.$R282];[$JSON.$N$1];[.$T282];[$JSON.$O$1];[.$W282];[$JSON.$P$1];[.$A282];[$JSON.$Q$1];[.$B282];[$JSON.$R$1])" office:value-type="string" office:string-value="{&quot;id&quot;:&quot;3-53&quot;,&quot;name&quot;:&quot;永遠の帝都&quot;,&quot;kana&quot;:&quot;えいえんのていと&quot;,&quot;traitText&quot;:null,&quot;ruleText&quot;:&quot;これが戦場にある間、自分の戦場の『ブロック+』能力を持つイジンと、自分の戦場のガーディアンは「能力によって破壊されない」を得る。¶これが戦場にある間、自分の戦場のレベル3以下のイジンは「ブロック+1000」を得る。&quot;,&quot;legacyText&quot;:null,&quot;imageUrl&quot;:&quot;https://one-draw.jp/ijinden/cardlist/003/card/03_053.png&quot;,&quot;expansion&quot;:35,&quot;rarity&quot;:1,&quot;type&quot;:2,&quot;level&quot;:4,&quot;color&quot;:2,&quot;term&quot;:0,&quot;trait&quot;:0,&quot;legacy&quot;:0,&quot;orderTable&quot;:281,&quot;orderDeck&quot;:262}," calcext:value-type="string">
            <text:p>{"id":"3-53","name":"永遠の帝都","kana":"えいえんのていと","traitText":null,"ruleText":"これが戦場にある間、自分の戦場の『ブロック+』能力を持つイジンと、自分の戦場のガーディアンは「能力によって破壊されない」を得る。¶これが戦場にある間、自分の戦場のレベル3以下のイジンは「ブロック+1000」を得る。","legacyText":null,"imageUrl":"https://one-draw.jp/ijinden/cardlist/003/card/03_053.png","expansion":35,"rarity":1,"type":2,"level":4,"color":2,"term":0,"trait":0,"legacy":0,"orderTable":281,"orderDeck":262},</text:p>
          </table:table-cell>
          <table:table-cell table:number-columns-repeated="16347"/>
        </table:table-row>
        <table:table-row table:style-name="ro2">
          <table:table-cell office:value-type="float" office:value="282" calcext:value-type="float">
            <text:p>282</text:p>
          </table:table-cell>
          <table:table-cell office:value-type="float" office:value="268" calcext:value-type="float">
            <text:p>268</text:p>
          </table:table-cell>
          <table:table-cell office:value-type="string" calcext:value-type="string">
            <text:p>3-54</text:p>
          </table:table-cell>
          <table:table-cell office:value-type="float" office:value="54" calcext:value-type="float">
            <text:p>54</text:p>
          </table:table-cell>
          <table:table-cell office:value-type="string" calcext:value-type="string">
            <text:p>暴風岬</text:p>
          </table:table-cell>
          <table:table-cell office:value-type="string" calcext:value-type="string">
            <text:p>ぼうふうみさき</text:p>
          </table:table-cell>
          <table:table-cell office:value-type="string" calcext:value-type="string">
            <text:p>第３弾ブースターパック</text:p>
          </table:table-cell>
          <table:table-cell table:formula="of:=VLOOKUP([.G283];[$収録番号.$A$1:$収録番号.$B$9];2;0)" office:value-type="float" office:value="35" calcext:value-type="float">
            <text:p>35</text:p>
          </table:table-cell>
          <table:table-cell office:value-type="string" calcext:value-type="string">
            <text:p>N</text:p>
          </table:table-cell>
          <table:table-cell table:formula="of:=VLOOKUP([.I283];[$レアリティ番号.$A$1:$レアリティ番号.$B$4];2;0)" office:value-type="float" office:value="1" calcext:value-type="float">
            <text:p>1</text:p>
          </table:table-cell>
          <table:table-cell office:value-type="string" calcext:value-type="string">
            <text:p>ハイケイ</text:p>
          </table:table-cell>
          <table:table-cell table:formula="of:=VLOOKUP([.K283];[$種類番号.$A$1:$種類番号.$B$4];2;0)" office:value-type="float" office:value="2" calcext:value-type="float">
            <text:p>2</text:p>
          </table:table-cell>
          <table:table-cell office:value-type="string" calcext:value-type="string">
            <text:p>青</text:p>
          </table:table-cell>
          <table:table-cell table:formula="of:=VLOOKUP([.M283];[$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8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83];[$特性番号.$A$1:$特性番号.$B$8];2;0);0)" office:value-type="float" office:value="0" calcext:value-type="float">
            <text:p>0</text:p>
          </table:table-cell>
          <table:table-cell office:value-type="string" calcext:value-type="string">
            <text:p>自分のエンドフェイズが開始したとき、自分の戦場のイジン1体を手札に戻して発動できる。1ドローする。</text:p>
          </table:table-cell>
          <table:table-cell table:style-name="ce8" office:value-type="string" calcext:value-type="string">
            <text:p>手札に戻す</text:p>
          </table:table-cell>
          <table:table-cell table:formula="of:=IFERROR(VLOOKUP([.$V283];[$遺業能力番号.$A$1:$遺業能力番号.$B$9];2;0);0)" office:value-type="float" office:value="5" calcext:value-type="float">
            <text:p>5</text:p>
          </table:table-cell>
          <table:table-cell office:value-type="string" calcext:value-type="string">
            <text:p>https://one-draw.jp/ijinden/cardlist/003/card/03_054.png</text:p>
          </table:table-cell>
          <table:table-cell table:formula="of:=CONCATENATE([$JSON.$A$1];[.$C283];[$JSON.$B$1];[.$E283];[$JSON.$C$1];[.$F283];[$JSON.$D$1];IF(ISNA([.$S283]);&quot;null&quot;;&quot;&quot;&quot;&quot;&amp;[.$S283]&amp;&quot;&quot;&quot;&quot;);[$JSON.$E$1];[.$U283];[$JSON.$F$1];IF(ISNA([.$V283]);&quot;null&quot;;&quot;&quot;&quot;&quot;&amp;[.$V283]&amp;&quot;&quot;&quot;&quot;);[$JSON.$G$1];[.$X283];[$JSON.$H$1];[.$H283];[$JSON.$I$1];[.J283];[$JSON.$J$1];[.$L283];[$JSON.$K$1];[.$O283];[$JSON.$L$1];[.$N283];[$JSON.$M$1];[.$R283];[$JSON.$N$1];[.$T283];[$JSON.$O$1];[.$W283];[$JSON.$P$1];[.$A283];[$JSON.$Q$1];[.$B283];[$JSON.$R$1])" office:value-type="string" office:string-value="{&quot;id&quot;:&quot;3-54&quot;,&quot;name&quot;:&quot;暴風岬&quot;,&quot;kana&quot;:&quot;ぼうふうみさき&quot;,&quot;traitText&quot;:null,&quot;ruleText&quot;:&quot;自分のエンドフェイズが開始したとき、自分の戦場のイジン1体を手札に戻して発動できる。1ドローする。&quot;,&quot;legacyText&quot;:&quot;手札に戻す&quot;,&quot;imageUrl&quot;:&quot;https://one-draw.jp/ijinden/cardlist/003/card/03_054.png&quot;,&quot;expansion&quot;:35,&quot;rarity&quot;:1,&quot;type&quot;:2,&quot;level&quot;:5,&quot;color&quot;:2,&quot;term&quot;:0,&quot;trait&quot;:0,&quot;legacy&quot;:5,&quot;orderTable&quot;:282,&quot;orderDeck&quot;:268}," calcext:value-type="string">
            <text:p>{"id":"3-54","name":"暴風岬","kana":"ぼうふうみさき","traitText":null,"ruleText":"自分のエンドフェイズが開始したとき、自分の戦場のイジン1体を手札に戻して発動できる。1ドローする。","legacyText":"手札に戻す","imageUrl":"https://one-draw.jp/ijinden/cardlist/003/card/03_054.png","expansion":35,"rarity":1,"type":2,"level":5,"color":2,"term":0,"trait":0,"legacy":5,"orderTable":282,"orderDeck":268},</text:p>
          </table:table-cell>
          <table:table-cell table:number-columns-repeated="16347"/>
        </table:table-row>
        <table:table-row table:style-name="ro2">
          <table:table-cell office:value-type="float" office:value="283" calcext:value-type="float">
            <text:p>283</text:p>
          </table:table-cell>
          <table:table-cell office:value-type="float" office:value="253" calcext:value-type="float">
            <text:p>253</text:p>
          </table:table-cell>
          <table:table-cell office:value-type="string" calcext:value-type="string">
            <text:p>3-55</text:p>
          </table:table-cell>
          <table:table-cell office:value-type="float" office:value="55" calcext:value-type="float">
            <text:p>55</text:p>
          </table:table-cell>
          <table:table-cell office:value-type="string" calcext:value-type="string">
            <text:p>商館並ぶ人工島</text:p>
          </table:table-cell>
          <table:table-cell office:value-type="string" calcext:value-type="string">
            <text:p>しょうかんならぶじんこうとう</text:p>
          </table:table-cell>
          <table:table-cell office:value-type="string" calcext:value-type="string">
            <text:p>第３弾ブースターパック</text:p>
          </table:table-cell>
          <table:table-cell table:formula="of:=VLOOKUP([.G284];[$収録番号.$A$1:$収録番号.$B$9];2;0)" office:value-type="float" office:value="35" calcext:value-type="float">
            <text:p>35</text:p>
          </table:table-cell>
          <table:table-cell office:value-type="string" calcext:value-type="string">
            <text:p>N</text:p>
          </table:table-cell>
          <table:table-cell table:formula="of:=VLOOKUP([.I284];[$レアリティ番号.$A$1:$レアリティ番号.$B$4];2;0)" office:value-type="float" office:value="1" calcext:value-type="float">
            <text:p>1</text:p>
          </table:table-cell>
          <table:table-cell office:value-type="string" calcext:value-type="string">
            <text:p>ハイケイ</text:p>
          </table:table-cell>
          <table:table-cell table:formula="of:=VLOOKUP([.K284];[$種類番号.$A$1:$種類番号.$B$4];2;0)" office:value-type="float" office:value="2" calcext:value-type="float">
            <text:p>2</text:p>
          </table:table-cell>
          <table:table-cell office:value-type="string" calcext:value-type="string">
            <text:p>緑</text:p>
          </table:table-cell>
          <table:table-cell table:formula="of:=VLOOKUP([.M284];[$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8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84];[$特性番号.$A$1:$特性番号.$B$8];2;0);0)" office:value-type="float" office:value="0" calcext:value-type="float">
            <text:p>0</text:p>
          </table:table-cell>
          <table:table-cell office:value-type="string" calcext:value-type="string">
            <text:p>メインフェイズが開始したとき、戦場の緑のイジン1体か、戦場の「航海」を持つイジン1体を寝かせて発動できる。そのイジンのプレイヤーは1ドローする。</text:p>
          </table:table-cell>
          <table:table-cell table:style-name="ce8" table:formula="of:=NA()" office:value-type="string" office:string-value="" calcext:value-type="error">
            <text:p>#N/A</text:p>
          </table:table-cell>
          <table:table-cell table:formula="of:=IFERROR(VLOOKUP([.$V284];[$遺業能力番号.$A$1:$遺業能力番号.$B$9];2;0);0)" office:value-type="float" office:value="0" calcext:value-type="float">
            <text:p>0</text:p>
          </table:table-cell>
          <table:table-cell office:value-type="string" calcext:value-type="string">
            <text:p>https://one-draw.jp/ijinden/cardlist/003/card/03_055.png</text:p>
          </table:table-cell>
          <table:table-cell table:formula="of:=CONCATENATE([$JSON.$A$1];[.$C284];[$JSON.$B$1];[.$E284];[$JSON.$C$1];[.$F284];[$JSON.$D$1];IF(ISNA([.$S284]);&quot;null&quot;;&quot;&quot;&quot;&quot;&amp;[.$S284]&amp;&quot;&quot;&quot;&quot;);[$JSON.$E$1];[.$U284];[$JSON.$F$1];IF(ISNA([.$V284]);&quot;null&quot;;&quot;&quot;&quot;&quot;&amp;[.$V284]&amp;&quot;&quot;&quot;&quot;);[$JSON.$G$1];[.$X284];[$JSON.$H$1];[.$H284];[$JSON.$I$1];[.J284];[$JSON.$J$1];[.$L284];[$JSON.$K$1];[.$O284];[$JSON.$L$1];[.$N284];[$JSON.$M$1];[.$R284];[$JSON.$N$1];[.$T284];[$JSON.$O$1];[.$W284];[$JSON.$P$1];[.$A284];[$JSON.$Q$1];[.$B284];[$JSON.$R$1])" office:value-type="string" office:string-value="{&quot;id&quot;:&quot;3-55&quot;,&quot;name&quot;:&quot;商館並ぶ人工島&quot;,&quot;kana&quot;:&quot;しょうかんならぶじんこうとう&quot;,&quot;traitText&quot;:null,&quot;ruleText&quot;:&quot;メインフェイズが開始したとき、戦場の緑のイジン1体か、戦場の「航海」を持つイジン1体を寝かせて発動できる。そのイジンのプレイヤーは1ドローする。&quot;,&quot;legacyText&quot;:null,&quot;imageUrl&quot;:&quot;https://one-draw.jp/ijinden/cardlist/003/card/03_055.png&quot;,&quot;expansion&quot;:35,&quot;rarity&quot;:1,&quot;type&quot;:2,&quot;level&quot;:3,&quot;color&quot;:4,&quot;term&quot;:0,&quot;trait&quot;:0,&quot;legacy&quot;:0,&quot;orderTable&quot;:283,&quot;orderDeck&quot;:253}," calcext:value-type="string">
            <text:p>{"id":"3-55","name":"商館並ぶ人工島","kana":"しょうかんならぶじんこうとう","traitText":null,"ruleText":"メインフェイズが開始したとき、戦場の緑のイジン1体か、戦場の「航海」を持つイジン1体を寝かせて発動できる。そのイジンのプレイヤーは1ドローする。","legacyText":null,"imageUrl":"https://one-draw.jp/ijinden/cardlist/003/card/03_055.png","expansion":35,"rarity":1,"type":2,"level":3,"color":4,"term":0,"trait":0,"legacy":0,"orderTable":283,"orderDeck":253},</text:p>
          </table:table-cell>
          <table:table-cell table:number-columns-repeated="16347"/>
        </table:table-row>
        <table:table-row table:style-name="ro2">
          <table:table-cell office:value-type="float" office:value="284" calcext:value-type="float">
            <text:p>284</text:p>
          </table:table-cell>
          <table:table-cell office:value-type="float" office:value="270" calcext:value-type="float">
            <text:p>270</text:p>
          </table:table-cell>
          <table:table-cell office:value-type="string" calcext:value-type="string">
            <text:p>3-56</text:p>
          </table:table-cell>
          <table:table-cell office:value-type="float" office:value="56" calcext:value-type="float">
            <text:p>56</text:p>
          </table:table-cell>
          <table:table-cell office:value-type="string" calcext:value-type="string">
            <text:p>志士の藩校</text:p>
          </table:table-cell>
          <table:table-cell office:value-type="string" calcext:value-type="string">
            <text:p>ししのはんこう</text:p>
          </table:table-cell>
          <table:table-cell office:value-type="string" calcext:value-type="string">
            <text:p>第３弾ブースターパック</text:p>
          </table:table-cell>
          <table:table-cell table:formula="of:=VLOOKUP([.G285];[$収録番号.$A$1:$収録番号.$B$9];2;0)" office:value-type="float" office:value="35" calcext:value-type="float">
            <text:p>35</text:p>
          </table:table-cell>
          <table:table-cell office:value-type="string" calcext:value-type="string">
            <text:p>N</text:p>
          </table:table-cell>
          <table:table-cell table:formula="of:=VLOOKUP([.I285];[$レアリティ番号.$A$1:$レアリティ番号.$B$4];2;0)" office:value-type="float" office:value="1" calcext:value-type="float">
            <text:p>1</text:p>
          </table:table-cell>
          <table:table-cell office:value-type="string" calcext:value-type="string">
            <text:p>ハイケイ</text:p>
          </table:table-cell>
          <table:table-cell table:formula="of:=VLOOKUP([.K285];[$種類番号.$A$1:$種類番号.$B$4];2;0)" office:value-type="float" office:value="2" calcext:value-type="float">
            <text:p>2</text:p>
          </table:table-cell>
          <table:table-cell office:value-type="string" calcext:value-type="string">
            <text:p>緑</text:p>
          </table:table-cell>
          <table:table-cell table:formula="of:=VLOOKUP([.M285];[$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執筆</text:p>
          </table:table-cell>
          <table:table-cell table:formula="of:=IFERROR(VLOOKUP([.$Q285];[$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285];[$特性番号.$A$1:$特性番号.$B$8];2;0);0)" office:value-type="float" office:value="0" calcext:value-type="float">
            <text:p>0</text:p>
          </table:table-cell>
          <table:table-cell office:value-type="string" calcext:value-type="string">
            <text:p>自分の戦場に「思想」イジンがいる間、自分の墓地のカードの「木霊」の遺業能力が発動する際、そのカードは「レベル+1」される。¶執筆 - ハイケイが戦場に置かれたときに発動する。自分の戦場のイジンすべては、このターンに限り「特性：思想」を得る。</text:p>
          </table:table-cell>
          <table:table-cell table:style-name="ce8" office:value-type="string" calcext:value-type="string">
            <text:p>木霊</text:p>
          </table:table-cell>
          <table:table-cell table:formula="of:=IFERROR(VLOOKUP([.$V285];[$遺業能力番号.$A$1:$遺業能力番号.$B$9];2;0);0)" office:value-type="float" office:value="8" calcext:value-type="float">
            <text:p>8</text:p>
          </table:table-cell>
          <table:table-cell office:value-type="string" calcext:value-type="string">
            <text:p>https://one-draw.jp/ijinden/cardlist/003/card/03_056.png</text:p>
          </table:table-cell>
          <table:table-cell table:formula="of:=CONCATENATE([$JSON.$A$1];[.$C285];[$JSON.$B$1];[.$E285];[$JSON.$C$1];[.$F285];[$JSON.$D$1];IF(ISNA([.$S285]);&quot;null&quot;;&quot;&quot;&quot;&quot;&amp;[.$S285]&amp;&quot;&quot;&quot;&quot;);[$JSON.$E$1];[.$U285];[$JSON.$F$1];IF(ISNA([.$V285]);&quot;null&quot;;&quot;&quot;&quot;&quot;&amp;[.$V285]&amp;&quot;&quot;&quot;&quot;);[$JSON.$G$1];[.$X285];[$JSON.$H$1];[.$H285];[$JSON.$I$1];[.J285];[$JSON.$J$1];[.$L285];[$JSON.$K$1];[.$O285];[$JSON.$L$1];[.$N285];[$JSON.$M$1];[.$R285];[$JSON.$N$1];[.$T285];[$JSON.$O$1];[.$W285];[$JSON.$P$1];[.$A285];[$JSON.$Q$1];[.$B285];[$JSON.$R$1])" office:value-type="string" office:string-value="{&quot;id&quot;:&quot;3-56&quot;,&quot;name&quot;:&quot;志士の藩校&quot;,&quot;kana&quot;:&quot;ししのはんこう&quot;,&quot;traitText&quot;:null,&quot;ruleText&quot;:&quot;自分の戦場に「思想」イジンがいる間、自分の墓地のカードの「木霊」の遺業能力が発動する際、そのカードは「レベル+1」される。¶執筆 - ハイケイが戦場に置かれたときに発動する。自分の戦場のイジンすべては、このターンに限り「特性：思想」を得る。&quot;,&quot;legacyText&quot;:&quot;木霊&quot;,&quot;imageUrl&quot;:&quot;https://one-draw.jp/ijinden/cardlist/003/card/03_056.png&quot;,&quot;expansion&quot;:35,&quot;rarity&quot;:1,&quot;type&quot;:2,&quot;level&quot;:5,&quot;color&quot;:4,&quot;term&quot;:2,&quot;trait&quot;:0,&quot;legacy&quot;:8,&quot;orderTable&quot;:284,&quot;orderDeck&quot;:270}," calcext:value-type="string">
            <text:p>{"id":"3-56","name":"志士の藩校","kana":"ししのはんこう","traitText":null,"ruleText":"自分の戦場に「思想」イジンがいる間、自分の墓地のカードの「木霊」の遺業能力が発動する際、そのカードは「レベル+1」される。¶執筆 - ハイケイが戦場に置かれたときに発動する。自分の戦場のイジンすべては、このターンに限り「特性：思想」を得る。","legacyText":"木霊","imageUrl":"https://one-draw.jp/ijinden/cardlist/003/card/03_056.png","expansion":35,"rarity":1,"type":2,"level":5,"color":4,"term":2,"trait":0,"legacy":8,"orderTable":284,"orderDeck":270},</text:p>
          </table:table-cell>
          <table:table-cell table:number-columns-repeated="16347"/>
        </table:table-row>
        <table:table-row table:style-name="ro2">
          <table:table-cell office:value-type="float" office:value="285" calcext:value-type="float">
            <text:p>285</text:p>
          </table:table-cell>
          <table:table-cell office:value-type="float" office:value="264" calcext:value-type="float">
            <text:p>264</text:p>
          </table:table-cell>
          <table:table-cell office:value-type="string" calcext:value-type="string">
            <text:p>3-57</text:p>
          </table:table-cell>
          <table:table-cell office:value-type="float" office:value="57" calcext:value-type="float">
            <text:p>57</text:p>
          </table:table-cell>
          <table:table-cell office:value-type="string" calcext:value-type="string">
            <text:p>風神雷神図</text:p>
          </table:table-cell>
          <table:table-cell office:value-type="string" calcext:value-type="string">
            <text:p>ふうじんらいじんず</text:p>
          </table:table-cell>
          <table:table-cell office:value-type="string" calcext:value-type="string">
            <text:p>第３弾ブースターパック</text:p>
          </table:table-cell>
          <table:table-cell table:formula="of:=VLOOKUP([.G286];[$収録番号.$A$1:$収録番号.$B$9];2;0)" office:value-type="float" office:value="35" calcext:value-type="float">
            <text:p>35</text:p>
          </table:table-cell>
          <table:table-cell office:value-type="string" calcext:value-type="string">
            <text:p>N</text:p>
          </table:table-cell>
          <table:table-cell table:formula="of:=VLOOKUP([.I286];[$レアリティ番号.$A$1:$レアリティ番号.$B$4];2;0)" office:value-type="float" office:value="1" calcext:value-type="float">
            <text:p>1</text:p>
          </table:table-cell>
          <table:table-cell office:value-type="string" calcext:value-type="string">
            <text:p>ハイケイ</text:p>
          </table:table-cell>
          <table:table-cell table:formula="of:=VLOOKUP([.K286];[$種類番号.$A$1:$種類番号.$B$4];2;0)" office:value-type="float" office:value="2" calcext:value-type="float">
            <text:p>2</text:p>
          </table:table-cell>
          <table:table-cell office:value-type="string" calcext:value-type="string">
            <text:p>黄</text:p>
          </table:table-cell>
          <table:table-cell table:formula="of:=VLOOKUP([.M286];[$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86];[$能力語番号.$A$1:$能力語番号.$B$10];2;0);0)" office:value-type="float" office:value="0" calcext:value-type="float">
            <text:p>0</text:p>
          </table:table-cell>
          <table:table-cell office:value-type="string" calcext:value-type="string">
            <text:p>美術</text:p>
          </table:table-cell>
          <table:table-cell table:formula="of:=IFERROR(VLOOKUP([.$S286];[$特性番号.$A$1:$特性番号.$B$8];2;0);0)" office:value-type="float" office:value="2" calcext:value-type="float">
            <text:p>2</text:p>
          </table:table-cell>
          <table:table-cell office:value-type="string" calcext:value-type="string">
            <text:p>戦場に置かれたとき、自分の戦場に黄の「美術」カードが3つ以上あるなら発動できる。自分の山札の上から1枚と、自分の山札の下から1枚を裏のまま魔力ゾーンに置く。</text:p>
          </table:table-cell>
          <table:table-cell table:style-name="ce8" office:value-type="string" calcext:value-type="string">
            <text:p>山札の上か下に戻す</text:p>
          </table:table-cell>
          <table:table-cell table:formula="of:=IFERROR(VLOOKUP([.$V286];[$遺業能力番号.$A$1:$遺業能力番号.$B$9];2;0);0)" office:value-type="float" office:value="7" calcext:value-type="float">
            <text:p>7</text:p>
          </table:table-cell>
          <table:table-cell office:value-type="string" calcext:value-type="string">
            <text:p>https://one-draw.jp/ijinden/cardlist/003/card/03_057.png</text:p>
          </table:table-cell>
          <table:table-cell table:formula="of:=CONCATENATE([$JSON.$A$1];[.$C286];[$JSON.$B$1];[.$E286];[$JSON.$C$1];[.$F286];[$JSON.$D$1];IF(ISNA([.$S286]);&quot;null&quot;;&quot;&quot;&quot;&quot;&amp;[.$S286]&amp;&quot;&quot;&quot;&quot;);[$JSON.$E$1];[.$U286];[$JSON.$F$1];IF(ISNA([.$V286]);&quot;null&quot;;&quot;&quot;&quot;&quot;&amp;[.$V286]&amp;&quot;&quot;&quot;&quot;);[$JSON.$G$1];[.$X286];[$JSON.$H$1];[.$H286];[$JSON.$I$1];[.J286];[$JSON.$J$1];[.$L286];[$JSON.$K$1];[.$O286];[$JSON.$L$1];[.$N286];[$JSON.$M$1];[.$R286];[$JSON.$N$1];[.$T286];[$JSON.$O$1];[.$W286];[$JSON.$P$1];[.$A286];[$JSON.$Q$1];[.$B286];[$JSON.$R$1])" office:value-type="string" office:string-value="{&quot;id&quot;:&quot;3-57&quot;,&quot;name&quot;:&quot;風神雷神図&quot;,&quot;kana&quot;:&quot;ふうじんらいじんず&quot;,&quot;traitText&quot;:&quot;美術&quot;,&quot;ruleText&quot;:&quot;戦場に置かれたとき、自分の戦場に黄の「美術」カードが3つ以上あるなら発動できる。自分の山札の上から1枚と、自分の山札の下から1枚を裏のまま魔力ゾーンに置く。&quot;,&quot;legacyText&quot;:&quot;山札の上か下に戻す&quot;,&quot;imageUrl&quot;:&quot;https://one-draw.jp/ijinden/cardlist/003/card/03_057.png&quot;,&quot;expansion&quot;:35,&quot;rarity&quot;:1,&quot;type&quot;:2,&quot;level&quot;:4,&quot;color&quot;:8,&quot;term&quot;:0,&quot;trait&quot;:2,&quot;legacy&quot;:7,&quot;orderTable&quot;:285,&quot;orderDeck&quot;:264}," calcext:value-type="string">
            <text:p>{"id":"3-57","name":"風神雷神図","kana":"ふうじんらいじんず","traitText":"美術","ruleText":"戦場に置かれたとき、自分の戦場に黄の「美術」カードが3つ以上あるなら発動できる。自分の山札の上から1枚と、自分の山札の下から1枚を裏のまま魔力ゾーンに置く。","legacyText":"山札の上か下に戻す","imageUrl":"https://one-draw.jp/ijinden/cardlist/003/card/03_057.png","expansion":35,"rarity":1,"type":2,"level":4,"color":8,"term":0,"trait":2,"legacy":7,"orderTable":285,"orderDeck":264},</text:p>
          </table:table-cell>
          <table:table-cell table:number-columns-repeated="16347"/>
        </table:table-row>
        <table:table-row table:style-name="ro2">
          <table:table-cell office:value-type="float" office:value="286" calcext:value-type="float">
            <text:p>286</text:p>
          </table:table-cell>
          <table:table-cell office:value-type="float" office:value="257" calcext:value-type="float">
            <text:p>257</text:p>
          </table:table-cell>
          <table:table-cell office:value-type="string" calcext:value-type="string">
            <text:p>3-58</text:p>
          </table:table-cell>
          <table:table-cell office:value-type="float" office:value="58" calcext:value-type="float">
            <text:p>58</text:p>
          </table:table-cell>
          <table:table-cell office:value-type="string" calcext:value-type="string">
            <text:p>茅葺き屋根の張出し舞台</text:p>
          </table:table-cell>
          <table:table-cell office:value-type="string" calcext:value-type="string">
            <text:p>かやぶきやねのはりだしぶたい</text:p>
          </table:table-cell>
          <table:table-cell office:value-type="string" calcext:value-type="string">
            <text:p>第３弾ブースターパック</text:p>
          </table:table-cell>
          <table:table-cell table:formula="of:=VLOOKUP([.G287];[$収録番号.$A$1:$収録番号.$B$9];2;0)" office:value-type="float" office:value="35" calcext:value-type="float">
            <text:p>35</text:p>
          </table:table-cell>
          <table:table-cell office:value-type="string" calcext:value-type="string">
            <text:p>N</text:p>
          </table:table-cell>
          <table:table-cell table:formula="of:=VLOOKUP([.I287];[$レアリティ番号.$A$1:$レアリティ番号.$B$4];2;0)" office:value-type="float" office:value="1" calcext:value-type="float">
            <text:p>1</text:p>
          </table:table-cell>
          <table:table-cell office:value-type="string" calcext:value-type="string">
            <text:p>ハイケイ</text:p>
          </table:table-cell>
          <table:table-cell table:formula="of:=VLOOKUP([.K287];[$種類番号.$A$1:$種類番号.$B$4];2;0)" office:value-type="float" office:value="2" calcext:value-type="float">
            <text:p>2</text:p>
          </table:table-cell>
          <table:table-cell office:value-type="string" calcext:value-type="string">
            <text:p>黄</text:p>
          </table:table-cell>
          <table:table-cell table:formula="of:=VLOOKUP([.M287];[$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8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87];[$特性番号.$A$1:$特性番号.$B$8];2;0);0)" office:value-type="float" office:value="0" calcext:value-type="float">
            <text:p>0</text:p>
          </table:table-cell>
          <table:table-cell office:value-type="string" calcext:value-type="string">
            <text:p>戦場に置かれたとき、自分の戦場の「執筆」を持つイジン1体を手札に戻して発動できる。イジン召喚権+1する。¶相手のターンの間、黄でないカードの「執筆」は発動しない。</text:p>
          </table:table-cell>
          <table:table-cell table:style-name="ce8" office:value-type="string" calcext:value-type="string">
            <text:p>山札の上か下に戻す</text:p>
          </table:table-cell>
          <table:table-cell table:formula="of:=IFERROR(VLOOKUP([.$V287];[$遺業能力番号.$A$1:$遺業能力番号.$B$9];2;0);0)" office:value-type="float" office:value="7" calcext:value-type="float">
            <text:p>7</text:p>
          </table:table-cell>
          <table:table-cell office:value-type="string" calcext:value-type="string">
            <text:p>https://one-draw.jp/ijinden/cardlist/003/card/03_058.png</text:p>
          </table:table-cell>
          <table:table-cell table:formula="of:=CONCATENATE([$JSON.$A$1];[.$C287];[$JSON.$B$1];[.$E287];[$JSON.$C$1];[.$F287];[$JSON.$D$1];IF(ISNA([.$S287]);&quot;null&quot;;&quot;&quot;&quot;&quot;&amp;[.$S287]&amp;&quot;&quot;&quot;&quot;);[$JSON.$E$1];[.$U287];[$JSON.$F$1];IF(ISNA([.$V287]);&quot;null&quot;;&quot;&quot;&quot;&quot;&amp;[.$V287]&amp;&quot;&quot;&quot;&quot;);[$JSON.$G$1];[.$X287];[$JSON.$H$1];[.$H287];[$JSON.$I$1];[.J287];[$JSON.$J$1];[.$L287];[$JSON.$K$1];[.$O287];[$JSON.$L$1];[.$N287];[$JSON.$M$1];[.$R287];[$JSON.$N$1];[.$T287];[$JSON.$O$1];[.$W287];[$JSON.$P$1];[.$A287];[$JSON.$Q$1];[.$B287];[$JSON.$R$1])" office:value-type="string" office:string-value="{&quot;id&quot;:&quot;3-58&quot;,&quot;name&quot;:&quot;茅葺き屋根の張出し舞台&quot;,&quot;kana&quot;:&quot;かやぶきやねのはりだしぶたい&quot;,&quot;traitText&quot;:null,&quot;ruleText&quot;:&quot;戦場に置かれたとき、自分の戦場の「執筆」を持つイジン1体を手札に戻して発動できる。イジン召喚権+1する。¶相手のターンの間、黄でないカードの「執筆」は発動しない。&quot;,&quot;legacyText&quot;:&quot;山札の上か下に戻す&quot;,&quot;imageUrl&quot;:&quot;https://one-draw.jp/ijinden/cardlist/003/card/03_058.png&quot;,&quot;expansion&quot;:35,&quot;rarity&quot;:1,&quot;type&quot;:2,&quot;level&quot;:3,&quot;color&quot;:8,&quot;term&quot;:0,&quot;trait&quot;:0,&quot;legacy&quot;:7,&quot;orderTable&quot;:286,&quot;orderDeck&quot;:257}," calcext:value-type="string">
            <text:p>{"id":"3-58","name":"茅葺き屋根の張出し舞台","kana":"かやぶきやねのはりだしぶたい","traitText":null,"ruleText":"戦場に置かれたとき、自分の戦場の「執筆」を持つイジン1体を手札に戻して発動できる。イジン召喚権+1する。¶相手のターンの間、黄でないカードの「執筆」は発動しない。","legacyText":"山札の上か下に戻す","imageUrl":"https://one-draw.jp/ijinden/cardlist/003/card/03_058.png","expansion":35,"rarity":1,"type":2,"level":3,"color":8,"term":0,"trait":0,"legacy":7,"orderTable":286,"orderDeck":257},</text:p>
          </table:table-cell>
          <table:table-cell table:number-columns-repeated="16347"/>
        </table:table-row>
        <table:table-row table:style-name="ro2">
          <table:table-cell office:value-type="float" office:value="287" calcext:value-type="float">
            <text:p>287</text:p>
          </table:table-cell>
          <table:table-cell office:value-type="float" office:value="247" calcext:value-type="float">
            <text:p>247</text:p>
          </table:table-cell>
          <table:table-cell office:value-type="string" calcext:value-type="string">
            <text:p>3-59</text:p>
          </table:table-cell>
          <table:table-cell office:value-type="float" office:value="59" calcext:value-type="float">
            <text:p>59</text:p>
          </table:table-cell>
          <table:table-cell office:value-type="string" calcext:value-type="string">
            <text:p>森閑たる離宮</text:p>
          </table:table-cell>
          <table:table-cell office:value-type="string" calcext:value-type="string">
            <text:p>しんかんたるりきゅう</text:p>
          </table:table-cell>
          <table:table-cell office:value-type="string" calcext:value-type="string">
            <text:p>第３弾ブースターパック</text:p>
          </table:table-cell>
          <table:table-cell table:formula="of:=VLOOKUP([.G288];[$収録番号.$A$1:$収録番号.$B$9];2;0)" office:value-type="float" office:value="35" calcext:value-type="float">
            <text:p>35</text:p>
          </table:table-cell>
          <table:table-cell office:value-type="string" calcext:value-type="string">
            <text:p>N</text:p>
          </table:table-cell>
          <table:table-cell table:formula="of:=VLOOKUP([.I288];[$レアリティ番号.$A$1:$レアリティ番号.$B$4];2;0)" office:value-type="float" office:value="1" calcext:value-type="float">
            <text:p>1</text:p>
          </table:table-cell>
          <table:table-cell office:value-type="string" calcext:value-type="string">
            <text:p>ハイケイ</text:p>
          </table:table-cell>
          <table:table-cell table:formula="of:=VLOOKUP([.K288];[$種類番号.$A$1:$種類番号.$B$4];2;0)" office:value-type="float" office:value="2" calcext:value-type="float">
            <text:p>2</text:p>
          </table:table-cell>
          <table:table-cell office:value-type="string" calcext:value-type="string">
            <text:p>紫</text:p>
          </table:table-cell>
          <table:table-cell table:formula="of:=VLOOKUP([.M288];[$色番号.$A$1:$色番号.$B$10];2;0)" office:value-type="float" office:value="16" calcext:value-type="float">
            <text:p>16</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8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88];[$特性番号.$A$1:$特性番号.$B$8];2;0);0)" office:value-type="float" office:value="0" calcext:value-type="float">
            <text:p>0</text:p>
          </table:table-cell>
          <table:table-cell office:value-type="string" calcext:value-type="string">
            <text:p>これが戦場にある間「冥府発動」でない遺業能力は発動しない。¶カードが戦場から墓地に置かれるたび、そのカードが「冥府発動」を持っていないなら、そのカードのプレイヤーの手札1枚を墓地に置く。その手札はそのプレイヤーが選ぶ。</text:p>
          </table:table-cell>
          <table:table-cell table:style-name="ce8" table:formula="of:=NA()" office:value-type="string" office:string-value="" calcext:value-type="error">
            <text:p>#N/A</text:p>
          </table:table-cell>
          <table:table-cell table:formula="of:=IFERROR(VLOOKUP([.$V288];[$遺業能力番号.$A$1:$遺業能力番号.$B$9];2;0);0)" office:value-type="float" office:value="0" calcext:value-type="float">
            <text:p>0</text:p>
          </table:table-cell>
          <table:table-cell office:value-type="string" calcext:value-type="string">
            <text:p>https://one-draw.jp/ijinden/cardlist/003/card/03_059.png</text:p>
          </table:table-cell>
          <table:table-cell table:formula="of:=CONCATENATE([$JSON.$A$1];[.$C288];[$JSON.$B$1];[.$E288];[$JSON.$C$1];[.$F288];[$JSON.$D$1];IF(ISNA([.$S288]);&quot;null&quot;;&quot;&quot;&quot;&quot;&amp;[.$S288]&amp;&quot;&quot;&quot;&quot;);[$JSON.$E$1];[.$U288];[$JSON.$F$1];IF(ISNA([.$V288]);&quot;null&quot;;&quot;&quot;&quot;&quot;&amp;[.$V288]&amp;&quot;&quot;&quot;&quot;);[$JSON.$G$1];[.$X288];[$JSON.$H$1];[.$H288];[$JSON.$I$1];[.J288];[$JSON.$J$1];[.$L288];[$JSON.$K$1];[.$O288];[$JSON.$L$1];[.$N288];[$JSON.$M$1];[.$R288];[$JSON.$N$1];[.$T288];[$JSON.$O$1];[.$W288];[$JSON.$P$1];[.$A288];[$JSON.$Q$1];[.$B288];[$JSON.$R$1])" office:value-type="string" office:string-value="{&quot;id&quot;:&quot;3-59&quot;,&quot;name&quot;:&quot;森閑たる離宮&quot;,&quot;kana&quot;:&quot;しんかんたるりきゅう&quot;,&quot;traitText&quot;:null,&quot;ruleText&quot;:&quot;これが戦場にある間「冥府発動」でない遺業能力は発動しない。¶カードが戦場から墓地に置かれるたび、そのカードが「冥府発動」を持っていないなら、そのカードのプレイヤーの手札1枚を墓地に置く。その手札はそのプレイヤーが選ぶ。&quot;,&quot;legacyText&quot;:null,&quot;imageUrl&quot;:&quot;https://one-draw.jp/ijinden/cardlist/003/card/03_059.png&quot;,&quot;expansion&quot;:35,&quot;rarity&quot;:1,&quot;type&quot;:2,&quot;level&quot;:2,&quot;color&quot;:16,&quot;term&quot;:0,&quot;trait&quot;:0,&quot;legacy&quot;:0,&quot;orderTable&quot;:287,&quot;orderDeck&quot;:247}," calcext:value-type="string">
            <text:p>{"id":"3-59","name":"森閑たる離宮","kana":"しんかんたるりきゅう","traitText":null,"ruleText":"これが戦場にある間「冥府発動」でない遺業能力は発動しない。¶カードが戦場から墓地に置かれるたび、そのカードが「冥府発動」を持っていないなら、そのカードのプレイヤーの手札1枚を墓地に置く。その手札はそのプレイヤーが選ぶ。","legacyText":null,"imageUrl":"https://one-draw.jp/ijinden/cardlist/003/card/03_059.png","expansion":35,"rarity":1,"type":2,"level":2,"color":16,"term":0,"trait":0,"legacy":0,"orderTable":287,"orderDeck":247},</text:p>
          </table:table-cell>
          <table:table-cell table:number-columns-repeated="16347"/>
        </table:table-row>
        <table:table-row table:style-name="ro2">
          <table:table-cell office:value-type="float" office:value="288" calcext:value-type="float">
            <text:p>288</text:p>
          </table:table-cell>
          <table:table-cell office:value-type="float" office:value="278" calcext:value-type="float">
            <text:p>278</text:p>
          </table:table-cell>
          <table:table-cell office:value-type="string" calcext:value-type="string">
            <text:p>3-60</text:p>
          </table:table-cell>
          <table:table-cell office:value-type="float" office:value="60" calcext:value-type="float">
            <text:p>60</text:p>
          </table:table-cell>
          <table:table-cell office:value-type="string" calcext:value-type="string">
            <text:p>黒船</text:p>
          </table:table-cell>
          <table:table-cell office:value-type="string" calcext:value-type="string">
            <text:p>くろふね</text:p>
          </table:table-cell>
          <table:table-cell office:value-type="string" calcext:value-type="string">
            <text:p>第３弾ブースターパック</text:p>
          </table:table-cell>
          <table:table-cell table:formula="of:=VLOOKUP([.G289];[$収録番号.$A$1:$収録番号.$B$9];2;0)" office:value-type="float" office:value="35" calcext:value-type="float">
            <text:p>35</text:p>
          </table:table-cell>
          <table:table-cell office:value-type="string" calcext:value-type="string">
            <text:p>N</text:p>
          </table:table-cell>
          <table:table-cell table:formula="of:=VLOOKUP([.I289];[$レアリティ番号.$A$1:$レアリティ番号.$B$4];2;0)" office:value-type="float" office:value="1" calcext:value-type="float">
            <text:p>1</text:p>
          </table:table-cell>
          <table:table-cell office:value-type="string" calcext:value-type="string">
            <text:p>ハイケイ</text:p>
          </table:table-cell>
          <table:table-cell table:formula="of:=VLOOKUP([.K289];[$種類番号.$A$1:$種類番号.$B$4];2;0)" office:value-type="float" office:value="2" calcext:value-type="float">
            <text:p>2</text:p>
          </table:table-cell>
          <table:table-cell office:value-type="string" calcext:value-type="string">
            <text:p>紫</text:p>
          </table:table-cell>
          <table:table-cell table:formula="of:=VLOOKUP([.M289];[$色番号.$A$1:$色番号.$B$10];2;0)" office:value-type="float" office:value="16" calcext:value-type="float">
            <text:p>16</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8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89];[$特性番号.$A$1:$特性番号.$B$8];2;0);0)" office:value-type="float" office:value="0" calcext:value-type="float">
            <text:p>0</text:p>
          </table:table-cell>
          <table:table-cell office:value-type="string" calcext:value-type="string">
            <text:p>戦場に置かれたとき、自分の手札1枚を墓地に置いて発動できる。相手の戦場のハイケイ1つを破壊する。¶イジン召喚によって紫のイジンが自分の戦場に置かれる際、そのイジンに装備させてもよい。¶装備 : 航海 - アタッカーになったとき、自分の戦場のガーディアン1体を手札に戻して、相手の戦場のガーディアン1体を手札に戻す。</text:p>
          </table:table-cell>
          <table:table-cell table:style-name="ce8" table:formula="of:=NA()" office:value-type="string" office:string-value="" calcext:value-type="error">
            <text:p>#N/A</text:p>
          </table:table-cell>
          <table:table-cell table:formula="of:=IFERROR(VLOOKUP([.$V289];[$遺業能力番号.$A$1:$遺業能力番号.$B$9];2;0);0)" office:value-type="float" office:value="0" calcext:value-type="float">
            <text:p>0</text:p>
          </table:table-cell>
          <table:table-cell office:value-type="string" calcext:value-type="string">
            <text:p>https://one-draw.jp/ijinden/cardlist/003/card/03_060.png</text:p>
          </table:table-cell>
          <table:table-cell table:formula="of:=CONCATENATE([$JSON.$A$1];[.$C289];[$JSON.$B$1];[.$E289];[$JSON.$C$1];[.$F289];[$JSON.$D$1];IF(ISNA([.$S289]);&quot;null&quot;;&quot;&quot;&quot;&quot;&amp;[.$S289]&amp;&quot;&quot;&quot;&quot;);[$JSON.$E$1];[.$U289];[$JSON.$F$1];IF(ISNA([.$V289]);&quot;null&quot;;&quot;&quot;&quot;&quot;&amp;[.$V289]&amp;&quot;&quot;&quot;&quot;);[$JSON.$G$1];[.$X289];[$JSON.$H$1];[.$H289];[$JSON.$I$1];[.J289];[$JSON.$J$1];[.$L289];[$JSON.$K$1];[.$O289];[$JSON.$L$1];[.$N289];[$JSON.$M$1];[.$R289];[$JSON.$N$1];[.$T289];[$JSON.$O$1];[.$W289];[$JSON.$P$1];[.$A289];[$JSON.$Q$1];[.$B289];[$JSON.$R$1])" office:value-type="string" office:string-value="{&quot;id&quot;:&quot;3-60&quot;,&quot;name&quot;:&quot;黒船&quot;,&quot;kana&quot;:&quot;くろふね&quot;,&quot;traitText&quot;:null,&quot;ruleText&quot;:&quot;戦場に置かれたとき、自分の手札1枚を墓地に置いて発動できる。相手の戦場のハイケイ1つを破壊する。¶イジン召喚によって紫のイジンが自分の戦場に置かれる際、そのイジンに装備させてもよい。¶装備 : 航海 - アタッカーになったとき、自分の戦場のガーディアン1体を手札に戻して、相手の戦場のガーディアン1体を手札に戻す。&quot;,&quot;legacyText&quot;:null,&quot;imageUrl&quot;:&quot;https://one-draw.jp/ijinden/cardlist/003/card/03_060.png&quot;,&quot;expansion&quot;:35,&quot;rarity&quot;:1,&quot;type&quot;:2,&quot;level&quot;:6,&quot;color&quot;:16,&quot;term&quot;:0,&quot;trait&quot;:0,&quot;legacy&quot;:0,&quot;orderTable&quot;:288,&quot;orderDeck&quot;:278}," calcext:value-type="string">
            <text:p>{"id":"3-60","name":"黒船","kana":"くろふね","traitText":null,"ruleText":"戦場に置かれたとき、自分の手札1枚を墓地に置いて発動できる。相手の戦場のハイケイ1つを破壊する。¶イジン召喚によって紫のイジンが自分の戦場に置かれる際、そのイジンに装備させてもよい。¶装備 : 航海 - アタッカーになったとき、自分の戦場のガーディアン1体を手札に戻して、相手の戦場のガーディアン1体を手札に戻す。","legacyText":null,"imageUrl":"https://one-draw.jp/ijinden/cardlist/003/card/03_060.png","expansion":35,"rarity":1,"type":2,"level":6,"color":16,"term":0,"trait":0,"legacy":0,"orderTable":288,"orderDeck":278},</text:p>
          </table:table-cell>
          <table:table-cell table:number-columns-repeated="16347"/>
        </table:table-row>
        <table:table-row table:style-name="ro2">
          <table:table-cell office:value-type="float" office:value="289" calcext:value-type="float">
            <text:p>289</text:p>
          </table:table-cell>
          <table:table-cell office:value-type="float" office:value="333" calcext:value-type="float">
            <text:p>333</text:p>
          </table:table-cell>
          <table:table-cell office:value-type="string" calcext:value-type="string">
            <text:p>3-61</text:p>
          </table:table-cell>
          <table:table-cell office:value-type="float" office:value="61" calcext:value-type="float">
            <text:p>61</text:p>
          </table:table-cell>
          <table:table-cell office:value-type="string" calcext:value-type="string">
            <text:p>サンダーボルト</text:p>
          </table:table-cell>
          <table:table-cell office:value-type="string" calcext:value-type="string">
            <text:p>さんだーぼると</text:p>
          </table:table-cell>
          <table:table-cell office:value-type="string" calcext:value-type="string">
            <text:p>第３弾ブースターパック</text:p>
          </table:table-cell>
          <table:table-cell table:formula="of:=VLOOKUP([.G290];[$収録番号.$A$1:$収録番号.$B$9];2;0)" office:value-type="float" office:value="35" calcext:value-type="float">
            <text:p>35</text:p>
          </table:table-cell>
          <table:table-cell office:value-type="string" calcext:value-type="string">
            <text:p>R</text:p>
          </table:table-cell>
          <table:table-cell table:formula="of:=VLOOKUP([.I290];[$レアリティ番号.$A$1:$レアリティ番号.$B$4];2;0)" office:value-type="float" office:value="2" calcext:value-type="float">
            <text:p>2</text:p>
          </table:table-cell>
          <table:table-cell office:value-type="string" calcext:value-type="string">
            <text:p>マホウ</text:p>
          </table:table-cell>
          <table:table-cell table:formula="of:=VLOOKUP([.K290];[$種類番号.$A$1:$種類番号.$B$4];2;0)" office:value-type="float" office:value="3" calcext:value-type="float">
            <text:p>3</text:p>
          </table:table-cell>
          <table:table-cell office:value-type="string" calcext:value-type="string">
            <text:p>赤</text:p>
          </table:table-cell>
          <table:table-cell table:formula="of:=VLOOKUP([.M290];[$色番号.$A$1:$色番号.$B$10];2;0)"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formula="of:=NA()" office:value-type="string" office:string-value="" calcext:value-type="error">
            <text:p>#N/A</text:p>
          </table:table-cell>
          <table:table-cell table:formula="of:=IFERROR(VLOOKUP([.$Q29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90];[$特性番号.$A$1:$特性番号.$B$8];2;0);0)" office:value-type="float" office:value="0" calcext:value-type="float">
            <text:p>0</text:p>
          </table:table-cell>
          <table:table-cell office:value-type="string" calcext:value-type="string">
            <text:p>相手の戦場のパワー4000以下のイジンすべてと、相手の戦場のハイケイすべてを破壊する。相手は、このターンに限り「自分の墓地の「冥府発動」でない遺業能力は発動しない」を得る。</text:p>
          </table:table-cell>
          <table:table-cell table:style-name="ce8" office:value-type="string" calcext:value-type="string">
            <text:p>魔力化</text:p>
          </table:table-cell>
          <table:table-cell table:formula="of:=IFERROR(VLOOKUP([.$V290];[$遺業能力番号.$A$1:$遺業能力番号.$B$9];2;0);0)" office:value-type="float" office:value="1" calcext:value-type="float">
            <text:p>1</text:p>
          </table:table-cell>
          <table:table-cell office:value-type="string" calcext:value-type="string">
            <text:p>https://one-draw.jp/ijinden/cardlist/003/card/03_061.png</text:p>
          </table:table-cell>
          <table:table-cell table:formula="of:=CONCATENATE([$JSON.$A$1];[.$C290];[$JSON.$B$1];[.$E290];[$JSON.$C$1];[.$F290];[$JSON.$D$1];IF(ISNA([.$S290]);&quot;null&quot;;&quot;&quot;&quot;&quot;&amp;[.$S290]&amp;&quot;&quot;&quot;&quot;);[$JSON.$E$1];[.$U290];[$JSON.$F$1];IF(ISNA([.$V290]);&quot;null&quot;;&quot;&quot;&quot;&quot;&amp;[.$V290]&amp;&quot;&quot;&quot;&quot;);[$JSON.$G$1];[.$X290];[$JSON.$H$1];[.$H290];[$JSON.$I$1];[.J290];[$JSON.$J$1];[.$L290];[$JSON.$K$1];[.$O290];[$JSON.$L$1];[.$N290];[$JSON.$M$1];[.$R290];[$JSON.$N$1];[.$T290];[$JSON.$O$1];[.$W290];[$JSON.$P$1];[.$A290];[$JSON.$Q$1];[.$B290];[$JSON.$R$1])" office:value-type="string" office:string-value="{&quot;id&quot;:&quot;3-61&quot;,&quot;name&quot;:&quot;サンダーボルト&quot;,&quot;kana&quot;:&quot;さんだーぼると&quot;,&quot;traitText&quot;:null,&quot;ruleText&quot;:&quot;相手の戦場のパワー4000以下のイジンすべてと、相手の戦場のハイケイすべてを破壊する。相手は、このターンに限り「自分の墓地の「冥府発動」でない遺業能力は発動しない」を得る。&quot;,&quot;legacyText&quot;:&quot;魔力化&quot;,&quot;imageUrl&quot;:&quot;https://one-draw.jp/ijinden/cardlist/003/card/03_061.png&quot;,&quot;expansion&quot;:35,&quot;rarity&quot;:2,&quot;type&quot;:3,&quot;level&quot;:6,&quot;color&quot;:1,&quot;term&quot;:0,&quot;trait&quot;:0,&quot;legacy&quot;:1,&quot;orderTable&quot;:289,&quot;orderDeck&quot;:333}," calcext:value-type="string">
            <text:p>{"id":"3-61","name":"サンダーボルト","kana":"さんだーぼると","traitText":null,"ruleText":"相手の戦場のパワー4000以下のイジンすべてと、相手の戦場のハイケイすべてを破壊する。相手は、このターンに限り「自分の墓地の「冥府発動」でない遺業能力は発動しない」を得る。","legacyText":"魔力化","imageUrl":"https://one-draw.jp/ijinden/cardlist/003/card/03_061.png","expansion":35,"rarity":2,"type":3,"level":6,"color":1,"term":0,"trait":0,"legacy":1,"orderTable":289,"orderDeck":333},</text:p>
          </table:table-cell>
          <table:table-cell table:number-columns-repeated="16347"/>
        </table:table-row>
        <table:table-row table:style-name="ro2">
          <table:table-cell office:value-type="float" office:value="290" calcext:value-type="float">
            <text:p>290</text:p>
          </table:table-cell>
          <table:table-cell office:value-type="float" office:value="293" calcext:value-type="float">
            <text:p>293</text:p>
          </table:table-cell>
          <table:table-cell office:value-type="string" calcext:value-type="string">
            <text:p>3-62</text:p>
          </table:table-cell>
          <table:table-cell office:value-type="float" office:value="62" calcext:value-type="float">
            <text:p>62</text:p>
          </table:table-cell>
          <table:table-cell office:value-type="string" calcext:value-type="string">
            <text:p>パイロオーラ</text:p>
          </table:table-cell>
          <table:table-cell office:value-type="string" calcext:value-type="string">
            <text:p>ぱいろおーら</text:p>
          </table:table-cell>
          <table:table-cell office:value-type="string" calcext:value-type="string">
            <text:p>第３弾ブースターパック</text:p>
          </table:table-cell>
          <table:table-cell table:formula="of:=VLOOKUP([.G291];[$収録番号.$A$1:$収録番号.$B$9];2;0)" office:value-type="float" office:value="35" calcext:value-type="float">
            <text:p>35</text:p>
          </table:table-cell>
          <table:table-cell office:value-type="string" calcext:value-type="string">
            <text:p>N</text:p>
          </table:table-cell>
          <table:table-cell table:formula="of:=VLOOKUP([.I291];[$レアリティ番号.$A$1:$レアリティ番号.$B$4];2;0)" office:value-type="float" office:value="1" calcext:value-type="float">
            <text:p>1</text:p>
          </table:table-cell>
          <table:table-cell office:value-type="string" calcext:value-type="string">
            <text:p>マホウ</text:p>
          </table:table-cell>
          <table:table-cell table:formula="of:=VLOOKUP([.K291];[$種類番号.$A$1:$種類番号.$B$4];2;0)" office:value-type="float" office:value="3" calcext:value-type="float">
            <text:p>3</text:p>
          </table:table-cell>
          <table:table-cell office:value-type="string" calcext:value-type="string">
            <text:p>赤</text:p>
          </table:table-cell>
          <table:table-cell table:formula="of:=VLOOKUP([.M291];[$色番号.$A$1:$色番号.$B$10];2;0)"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29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91];[$特性番号.$A$1:$特性番号.$B$8];2;0);0)" office:value-type="float" office:value="0" calcext:value-type="float">
            <text:p>0</text:p>
          </table:table-cell>
          <table:table-cell office:value-type="string" calcext:value-type="string">
            <text:p>1ドローする。¶マホウ使用によって墓地に置かれる際「冥装」を得た状態で墓地に置かれる。¶装備 : これが赤の間「アタック+4000」を得る。</text:p>
          </table:table-cell>
          <table:table-cell table:style-name="ce8" office:value-type="string" calcext:value-type="string">
            <text:p>魔力化</text:p>
          </table:table-cell>
          <table:table-cell table:formula="of:=IFERROR(VLOOKUP([.$V291];[$遺業能力番号.$A$1:$遺業能力番号.$B$9];2;0);0)" office:value-type="float" office:value="1" calcext:value-type="float">
            <text:p>1</text:p>
          </table:table-cell>
          <table:table-cell office:value-type="string" calcext:value-type="string">
            <text:p>https://one-draw.jp/ijinden/cardlist/003/card/03_062.png</text:p>
          </table:table-cell>
          <table:table-cell table:formula="of:=CONCATENATE([$JSON.$A$1];[.$C291];[$JSON.$B$1];[.$E291];[$JSON.$C$1];[.$F291];[$JSON.$D$1];IF(ISNA([.$S291]);&quot;null&quot;;&quot;&quot;&quot;&quot;&amp;[.$S291]&amp;&quot;&quot;&quot;&quot;);[$JSON.$E$1];[.$U291];[$JSON.$F$1];IF(ISNA([.$V291]);&quot;null&quot;;&quot;&quot;&quot;&quot;&amp;[.$V291]&amp;&quot;&quot;&quot;&quot;);[$JSON.$G$1];[.$X291];[$JSON.$H$1];[.$H291];[$JSON.$I$1];[.J291];[$JSON.$J$1];[.$L291];[$JSON.$K$1];[.$O291];[$JSON.$L$1];[.$N291];[$JSON.$M$1];[.$R291];[$JSON.$N$1];[.$T291];[$JSON.$O$1];[.$W291];[$JSON.$P$1];[.$A291];[$JSON.$Q$1];[.$B291];[$JSON.$R$1])" office:value-type="string" office:string-value="{&quot;id&quot;:&quot;3-62&quot;,&quot;name&quot;:&quot;パイロオーラ&quot;,&quot;kana&quot;:&quot;ぱいろおーら&quot;,&quot;traitText&quot;:null,&quot;ruleText&quot;:&quot;1ドローする。¶マホウ使用によって墓地に置かれる際「冥装」を得た状態で墓地に置かれる。¶装備 : これが赤の間「アタック+4000」を得る。&quot;,&quot;legacyText&quot;:&quot;魔力化&quot;,&quot;imageUrl&quot;:&quot;https://one-draw.jp/ijinden/cardlist/003/card/03_062.png&quot;,&quot;expansion&quot;:35,&quot;rarity&quot;:1,&quot;type&quot;:3,&quot;level&quot;:2,&quot;color&quot;:1,&quot;term&quot;:0,&quot;trait&quot;:0,&quot;legacy&quot;:1,&quot;orderTable&quot;:290,&quot;orderDeck&quot;:293}," calcext:value-type="string">
            <text:p>{"id":"3-62","name":"パイロオーラ","kana":"ぱいろおーら","traitText":null,"ruleText":"1ドローする。¶マホウ使用によって墓地に置かれる際「冥装」を得た状態で墓地に置かれる。¶装備 : これが赤の間「アタック+4000」を得る。","legacyText":"魔力化","imageUrl":"https://one-draw.jp/ijinden/cardlist/003/card/03_062.png","expansion":35,"rarity":1,"type":3,"level":2,"color":1,"term":0,"trait":0,"legacy":1,"orderTable":290,"orderDeck":293},</text:p>
          </table:table-cell>
          <table:table-cell table:number-columns-repeated="16347"/>
        </table:table-row>
        <table:table-row table:style-name="ro2">
          <table:table-cell office:value-type="float" office:value="291" calcext:value-type="float">
            <text:p>291</text:p>
          </table:table-cell>
          <table:table-cell office:value-type="float" office:value="336" calcext:value-type="float">
            <text:p>336</text:p>
          </table:table-cell>
          <table:table-cell office:value-type="string" calcext:value-type="string">
            <text:p>3-63</text:p>
          </table:table-cell>
          <table:table-cell office:value-type="float" office:value="63" calcext:value-type="float">
            <text:p>63</text:p>
          </table:table-cell>
          <table:table-cell office:value-type="string" calcext:value-type="string">
            <text:p>アイオン</text:p>
          </table:table-cell>
          <table:table-cell office:value-type="string" calcext:value-type="string">
            <text:p>あいおん</text:p>
          </table:table-cell>
          <table:table-cell office:value-type="string" calcext:value-type="string">
            <text:p>第３弾ブースターパック</text:p>
          </table:table-cell>
          <table:table-cell table:formula="of:=VLOOKUP([.G292];[$収録番号.$A$1:$収録番号.$B$9];2;0)" office:value-type="float" office:value="35" calcext:value-type="float">
            <text:p>35</text:p>
          </table:table-cell>
          <table:table-cell office:value-type="string" calcext:value-type="string">
            <text:p>R</text:p>
          </table:table-cell>
          <table:table-cell table:formula="of:=VLOOKUP([.I292];[$レアリティ番号.$A$1:$レアリティ番号.$B$4];2;0)" office:value-type="float" office:value="2" calcext:value-type="float">
            <text:p>2</text:p>
          </table:table-cell>
          <table:table-cell office:value-type="string" calcext:value-type="string">
            <text:p>マホウ</text:p>
          </table:table-cell>
          <table:table-cell table:formula="of:=VLOOKUP([.K292];[$種類番号.$A$1:$種類番号.$B$4];2;0)" office:value-type="float" office:value="3" calcext:value-type="float">
            <text:p>3</text:p>
          </table:table-cell>
          <table:table-cell office:value-type="string" calcext:value-type="string">
            <text:p>青</text:p>
          </table:table-cell>
          <table:table-cell table:formula="of:=VLOOKUP([.M292];[$色番号.$A$1:$色番号.$B$10];2;0)" office:value-type="float" office:value="2" calcext:value-type="float">
            <text:p>2</text:p>
          </table:table-cell>
          <table:table-cell office:value-type="float" office:value="10" calcext:value-type="float">
            <text:p>10</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Q29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92];[$特性番号.$A$1:$特性番号.$B$8];2;0);0)" office:value-type="float" office:value="0" calcext:value-type="float">
            <text:p>0</text:p>
          </table:table-cell>
          <table:table-cell office:value-type="string" calcext:value-type="string">
            <text:p>これのマホウ使用に際し、これのレベルは、自分の手札の他のカード1つにつき1だけ下がる。¶自分の他の手札すべてを山札に戻してシャッフルし、7ドローする。その後、自分は、このターンに限り「マホウ使用できない」を得る。</text:p>
          </table:table-cell>
          <table:table-cell table:style-name="ce8" office:value-type="string" calcext:value-type="string">
            <text:p>手札に戻す</text:p>
          </table:table-cell>
          <table:table-cell table:formula="of:=IFERROR(VLOOKUP([.$V292];[$遺業能力番号.$A$1:$遺業能力番号.$B$9];2;0);0)" office:value-type="float" office:value="5" calcext:value-type="float">
            <text:p>5</text:p>
          </table:table-cell>
          <table:table-cell office:value-type="string" calcext:value-type="string">
            <text:p>https://one-draw.jp/ijinden/cardlist/003/card/03_063.png</text:p>
          </table:table-cell>
          <table:table-cell table:formula="of:=CONCATENATE([$JSON.$A$1];[.$C292];[$JSON.$B$1];[.$E292];[$JSON.$C$1];[.$F292];[$JSON.$D$1];IF(ISNA([.$S292]);&quot;null&quot;;&quot;&quot;&quot;&quot;&amp;[.$S292]&amp;&quot;&quot;&quot;&quot;);[$JSON.$E$1];[.$U292];[$JSON.$F$1];IF(ISNA([.$V292]);&quot;null&quot;;&quot;&quot;&quot;&quot;&amp;[.$V292]&amp;&quot;&quot;&quot;&quot;);[$JSON.$G$1];[.$X292];[$JSON.$H$1];[.$H292];[$JSON.$I$1];[.J292];[$JSON.$J$1];[.$L292];[$JSON.$K$1];[.$O292];[$JSON.$L$1];[.$N292];[$JSON.$M$1];[.$R292];[$JSON.$N$1];[.$T292];[$JSON.$O$1];[.$W292];[$JSON.$P$1];[.$A292];[$JSON.$Q$1];[.$B292];[$JSON.$R$1])" office:value-type="string" office:string-value="{&quot;id&quot;:&quot;3-63&quot;,&quot;name&quot;:&quot;アイオン&quot;,&quot;kana&quot;:&quot;あいおん&quot;,&quot;traitText&quot;:null,&quot;ruleText&quot;:&quot;これのマホウ使用に際し、これのレベルは、自分の手札の他のカード1つにつき1だけ下がる。¶自分の他の手札すべてを山札に戻してシャッフルし、7ドローする。その後、自分は、このターンに限り「マホウ使用できない」を得る。&quot;,&quot;legacyText&quot;:&quot;手札に戻す&quot;,&quot;imageUrl&quot;:&quot;https://one-draw.jp/ijinden/cardlist/003/card/03_063.png&quot;,&quot;expansion&quot;:35,&quot;rarity&quot;:2,&quot;type&quot;:3,&quot;level&quot;:10,&quot;color&quot;:2,&quot;term&quot;:0,&quot;trait&quot;:0,&quot;legacy&quot;:5,&quot;orderTable&quot;:291,&quot;orderDeck&quot;:336}," calcext:value-type="string">
            <text:p>{"id":"3-63","name":"アイオン","kana":"あいおん","traitText":null,"ruleText":"これのマホウ使用に際し、これのレベルは、自分の手札の他のカード1つにつき1だけ下がる。¶自分の他の手札すべてを山札に戻してシャッフルし、7ドローする。その後、自分は、このターンに限り「マホウ使用できない」を得る。","legacyText":"手札に戻す","imageUrl":"https://one-draw.jp/ijinden/cardlist/003/card/03_063.png","expansion":35,"rarity":2,"type":3,"level":10,"color":2,"term":0,"trait":0,"legacy":5,"orderTable":291,"orderDeck":336},</text:p>
          </table:table-cell>
          <table:table-cell table:number-columns-repeated="16347"/>
        </table:table-row>
        <table:table-row table:style-name="ro2">
          <table:table-cell office:value-type="float" office:value="292" calcext:value-type="float">
            <text:p>292</text:p>
          </table:table-cell>
          <table:table-cell office:value-type="float" office:value="297" calcext:value-type="float">
            <text:p>297</text:p>
          </table:table-cell>
          <table:table-cell office:value-type="string" calcext:value-type="string">
            <text:p>3-64</text:p>
          </table:table-cell>
          <table:table-cell office:value-type="float" office:value="64" calcext:value-type="float">
            <text:p>64</text:p>
          </table:table-cell>
          <table:table-cell office:value-type="string" calcext:value-type="string">
            <text:p>ハイドロオーラ</text:p>
          </table:table-cell>
          <table:table-cell office:value-type="string" calcext:value-type="string">
            <text:p>はいどろおーら</text:p>
          </table:table-cell>
          <table:table-cell office:value-type="string" calcext:value-type="string">
            <text:p>第３弾ブースターパック</text:p>
          </table:table-cell>
          <table:table-cell table:formula="of:=VLOOKUP([.G293];[$収録番号.$A$1:$収録番号.$B$9];2;0)" office:value-type="float" office:value="35" calcext:value-type="float">
            <text:p>35</text:p>
          </table:table-cell>
          <table:table-cell office:value-type="string" calcext:value-type="string">
            <text:p>N</text:p>
          </table:table-cell>
          <table:table-cell table:formula="of:=VLOOKUP([.I293];[$レアリティ番号.$A$1:$レアリティ番号.$B$4];2;0)" office:value-type="float" office:value="1" calcext:value-type="float">
            <text:p>1</text:p>
          </table:table-cell>
          <table:table-cell office:value-type="string" calcext:value-type="string">
            <text:p>マホウ</text:p>
          </table:table-cell>
          <table:table-cell table:formula="of:=VLOOKUP([.K293];[$種類番号.$A$1:$種類番号.$B$4];2;0)" office:value-type="float" office:value="3" calcext:value-type="float">
            <text:p>3</text:p>
          </table:table-cell>
          <table:table-cell office:value-type="string" calcext:value-type="string">
            <text:p>青</text:p>
          </table:table-cell>
          <table:table-cell table:formula="of:=VLOOKUP([.M293];[$色番号.$A$1:$色番号.$B$10];2;0)"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29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93];[$特性番号.$A$1:$特性番号.$B$8];2;0);0)" office:value-type="float" office:value="0" calcext:value-type="float">
            <text:p>0</text:p>
          </table:table-cell>
          <table:table-cell office:value-type="string" calcext:value-type="string">
            <text:p>1ドローする。¶マホウ使用によって墓地に置かれる際「冥装」を得た状態で墓地に置かれる。¶装備 : これが青の間「ブロック+4000」を得る。</text:p>
          </table:table-cell>
          <table:table-cell table:style-name="ce8" office:value-type="string" calcext:value-type="string">
            <text:p>魔力化</text:p>
          </table:table-cell>
          <table:table-cell table:formula="of:=IFERROR(VLOOKUP([.$V293];[$遺業能力番号.$A$1:$遺業能力番号.$B$9];2;0);0)" office:value-type="float" office:value="1" calcext:value-type="float">
            <text:p>1</text:p>
          </table:table-cell>
          <table:table-cell office:value-type="string" calcext:value-type="string">
            <text:p>https://one-draw.jp/ijinden/cardlist/003/card/03_064.png</text:p>
          </table:table-cell>
          <table:table-cell table:formula="of:=CONCATENATE([$JSON.$A$1];[.$C293];[$JSON.$B$1];[.$E293];[$JSON.$C$1];[.$F293];[$JSON.$D$1];IF(ISNA([.$S293]);&quot;null&quot;;&quot;&quot;&quot;&quot;&amp;[.$S293]&amp;&quot;&quot;&quot;&quot;);[$JSON.$E$1];[.$U293];[$JSON.$F$1];IF(ISNA([.$V293]);&quot;null&quot;;&quot;&quot;&quot;&quot;&amp;[.$V293]&amp;&quot;&quot;&quot;&quot;);[$JSON.$G$1];[.$X293];[$JSON.$H$1];[.$H293];[$JSON.$I$1];[.J293];[$JSON.$J$1];[.$L293];[$JSON.$K$1];[.$O293];[$JSON.$L$1];[.$N293];[$JSON.$M$1];[.$R293];[$JSON.$N$1];[.$T293];[$JSON.$O$1];[.$W293];[$JSON.$P$1];[.$A293];[$JSON.$Q$1];[.$B293];[$JSON.$R$1])" office:value-type="string" office:string-value="{&quot;id&quot;:&quot;3-64&quot;,&quot;name&quot;:&quot;ハイドロオーラ&quot;,&quot;kana&quot;:&quot;はいどろおーら&quot;,&quot;traitText&quot;:null,&quot;ruleText&quot;:&quot;1ドローする。¶マホウ使用によって墓地に置かれる際「冥装」を得た状態で墓地に置かれる。¶装備 : これが青の間「ブロック+4000」を得る。&quot;,&quot;legacyText&quot;:&quot;魔力化&quot;,&quot;imageUrl&quot;:&quot;https://one-draw.jp/ijinden/cardlist/003/card/03_064.png&quot;,&quot;expansion&quot;:35,&quot;rarity&quot;:1,&quot;type&quot;:3,&quot;level&quot;:2,&quot;color&quot;:2,&quot;term&quot;:0,&quot;trait&quot;:0,&quot;legacy&quot;:1,&quot;orderTable&quot;:292,&quot;orderDeck&quot;:297}," calcext:value-type="string">
            <text:p>{"id":"3-64","name":"ハイドロオーラ","kana":"はいどろおーら","traitText":null,"ruleText":"1ドローする。¶マホウ使用によって墓地に置かれる際「冥装」を得た状態で墓地に置かれる。¶装備 : これが青の間「ブロック+4000」を得る。","legacyText":"魔力化","imageUrl":"https://one-draw.jp/ijinden/cardlist/003/card/03_064.png","expansion":35,"rarity":1,"type":3,"level":2,"color":2,"term":0,"trait":0,"legacy":1,"orderTable":292,"orderDeck":297},</text:p>
          </table:table-cell>
          <table:table-cell table:number-columns-repeated="16347"/>
        </table:table-row>
        <table:table-row table:style-name="ro2">
          <table:table-cell office:value-type="float" office:value="293" calcext:value-type="float">
            <text:p>293</text:p>
          </table:table-cell>
          <table:table-cell office:value-type="float" office:value="326" calcext:value-type="float">
            <text:p>326</text:p>
          </table:table-cell>
          <table:table-cell office:value-type="string" calcext:value-type="string">
            <text:p>3-65</text:p>
          </table:table-cell>
          <table:table-cell office:value-type="float" office:value="65" calcext:value-type="float">
            <text:p>65</text:p>
          </table:table-cell>
          <table:table-cell office:value-type="string" calcext:value-type="string">
            <text:p>ソーサリー</text:p>
          </table:table-cell>
          <table:table-cell office:value-type="string" calcext:value-type="string">
            <text:p>そーさりー</text:p>
          </table:table-cell>
          <table:table-cell office:value-type="string" calcext:value-type="string">
            <text:p>第３弾ブースターパック</text:p>
          </table:table-cell>
          <table:table-cell table:formula="of:=VLOOKUP([.G294];[$収録番号.$A$1:$収録番号.$B$9];2;0)" office:value-type="float" office:value="35" calcext:value-type="float">
            <text:p>35</text:p>
          </table:table-cell>
          <table:table-cell office:value-type="string" calcext:value-type="string">
            <text:p>N</text:p>
          </table:table-cell>
          <table:table-cell table:formula="of:=VLOOKUP([.I294];[$レアリティ番号.$A$1:$レアリティ番号.$B$4];2;0)" office:value-type="float" office:value="1" calcext:value-type="float">
            <text:p>1</text:p>
          </table:table-cell>
          <table:table-cell office:value-type="string" calcext:value-type="string">
            <text:p>マホウ</text:p>
          </table:table-cell>
          <table:table-cell table:formula="of:=VLOOKUP([.K294];[$種類番号.$A$1:$種類番号.$B$4];2;0)" office:value-type="float" office:value="3" calcext:value-type="float">
            <text:p>3</text:p>
          </table:table-cell>
          <table:table-cell office:value-type="string" calcext:value-type="string">
            <text:p>緑</text:p>
          </table:table-cell>
          <table:table-cell table:formula="of:=VLOOKUP([.M294];[$色番号.$A$1:$色番号.$B$10];2;0)"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Q29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94];[$特性番号.$A$1:$特性番号.$B$8];2;0);0)" office:value-type="float" office:value="0" calcext:value-type="float">
            <text:p>0</text:p>
          </table:table-cell>
          <table:table-cell office:value-type="string" calcext:value-type="string">
            <text:p>自分の山札の上から1枚を見て、自分の魔力ゾーンに裏向きのまま置く。そのカードがハイケイかマホウなら、魔力ゾーンに置くかわりに、相手に見せて自分の手札に加えてもよい。</text:p>
          </table:table-cell>
          <table:table-cell table:style-name="ce8" office:value-type="string" calcext:value-type="string">
            <text:p>冥府発動</text:p>
          </table:table-cell>
          <table:table-cell table:formula="of:=IFERROR(VLOOKUP([.$V294];[$遺業能力番号.$A$1:$遺業能力番号.$B$9];2;0);0)" office:value-type="float" office:value="2" calcext:value-type="float">
            <text:p>2</text:p>
          </table:table-cell>
          <table:table-cell office:value-type="string" calcext:value-type="string">
            <text:p>https://one-draw.jp/ijinden/cardlist/003/card/03_065.png</text:p>
          </table:table-cell>
          <table:table-cell table:formula="of:=CONCATENATE([$JSON.$A$1];[.$C294];[$JSON.$B$1];[.$E294];[$JSON.$C$1];[.$F294];[$JSON.$D$1];IF(ISNA([.$S294]);&quot;null&quot;;&quot;&quot;&quot;&quot;&amp;[.$S294]&amp;&quot;&quot;&quot;&quot;);[$JSON.$E$1];[.$U294];[$JSON.$F$1];IF(ISNA([.$V294]);&quot;null&quot;;&quot;&quot;&quot;&quot;&amp;[.$V294]&amp;&quot;&quot;&quot;&quot;);[$JSON.$G$1];[.$X294];[$JSON.$H$1];[.$H294];[$JSON.$I$1];[.J294];[$JSON.$J$1];[.$L294];[$JSON.$K$1];[.$O294];[$JSON.$L$1];[.$N294];[$JSON.$M$1];[.$R294];[$JSON.$N$1];[.$T294];[$JSON.$O$1];[.$W294];[$JSON.$P$1];[.$A294];[$JSON.$Q$1];[.$B294];[$JSON.$R$1])" office:value-type="string" office:string-value="{&quot;id&quot;:&quot;3-65&quot;,&quot;name&quot;:&quot;ソーサリー&quot;,&quot;kana&quot;:&quot;そーさりー&quot;,&quot;traitText&quot;:null,&quot;ruleText&quot;:&quot;自分の山札の上から1枚を見て、自分の魔力ゾーンに裏向きのまま置く。そのカードがハイケイかマホウなら、魔力ゾーンに置くかわりに、相手に見せて自分の手札に加えてもよい。&quot;,&quot;legacyText&quot;:&quot;冥府発動&quot;,&quot;imageUrl&quot;:&quot;https://one-draw.jp/ijinden/cardlist/003/card/03_065.png&quot;,&quot;expansion&quot;:35,&quot;rarity&quot;:1,&quot;type&quot;:3,&quot;level&quot;:5,&quot;color&quot;:4,&quot;term&quot;:0,&quot;trait&quot;:0,&quot;legacy&quot;:2,&quot;orderTable&quot;:293,&quot;orderDeck&quot;:326}," calcext:value-type="string">
            <text:p>{"id":"3-65","name":"ソーサリー","kana":"そーさりー","traitText":null,"ruleText":"自分の山札の上から1枚を見て、自分の魔力ゾーンに裏向きのまま置く。そのカードがハイケイかマホウなら、魔力ゾーンに置くかわりに、相手に見せて自分の手札に加えてもよい。","legacyText":"冥府発動","imageUrl":"https://one-draw.jp/ijinden/cardlist/003/card/03_065.png","expansion":35,"rarity":1,"type":3,"level":5,"color":4,"term":0,"trait":0,"legacy":2,"orderTable":293,"orderDeck":326},</text:p>
          </table:table-cell>
          <table:table-cell table:number-columns-repeated="16347"/>
        </table:table-row>
        <table:table-row table:style-name="ro2">
          <table:table-cell office:value-type="float" office:value="294" calcext:value-type="float">
            <text:p>294</text:p>
          </table:table-cell>
          <table:table-cell office:value-type="float" office:value="298" calcext:value-type="float">
            <text:p>298</text:p>
          </table:table-cell>
          <table:table-cell office:value-type="string" calcext:value-type="string">
            <text:p>3-66</text:p>
          </table:table-cell>
          <table:table-cell office:value-type="float" office:value="66" calcext:value-type="float">
            <text:p>66</text:p>
          </table:table-cell>
          <table:table-cell office:value-type="string" calcext:value-type="string">
            <text:p>クロロオーラ</text:p>
          </table:table-cell>
          <table:table-cell office:value-type="string" calcext:value-type="string">
            <text:p>くろろおーら</text:p>
          </table:table-cell>
          <table:table-cell office:value-type="string" calcext:value-type="string">
            <text:p>第３弾ブースターパック</text:p>
          </table:table-cell>
          <table:table-cell table:formula="of:=VLOOKUP([.G295];[$収録番号.$A$1:$収録番号.$B$9];2;0)" office:value-type="float" office:value="35" calcext:value-type="float">
            <text:p>35</text:p>
          </table:table-cell>
          <table:table-cell office:value-type="string" calcext:value-type="string">
            <text:p>N</text:p>
          </table:table-cell>
          <table:table-cell table:formula="of:=VLOOKUP([.I295];[$レアリティ番号.$A$1:$レアリティ番号.$B$4];2;0)" office:value-type="float" office:value="1" calcext:value-type="float">
            <text:p>1</text:p>
          </table:table-cell>
          <table:table-cell office:value-type="string" calcext:value-type="string">
            <text:p>マホウ</text:p>
          </table:table-cell>
          <table:table-cell table:formula="of:=VLOOKUP([.K295];[$種類番号.$A$1:$種類番号.$B$4];2;0)" office:value-type="float" office:value="3" calcext:value-type="float">
            <text:p>3</text:p>
          </table:table-cell>
          <table:table-cell office:value-type="string" calcext:value-type="string">
            <text:p>緑</text:p>
          </table:table-cell>
          <table:table-cell table:formula="of:=VLOOKUP([.M295];[$色番号.$A$1:$色番号.$B$10];2;0)"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29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95];[$特性番号.$A$1:$特性番号.$B$8];2;0);0)" office:value-type="float" office:value="0" calcext:value-type="float">
            <text:p>0</text:p>
          </table:table-cell>
          <table:table-cell office:value-type="string" calcext:value-type="string">
            <text:p>1ドローする。¶マホウ使用によって墓地に置かれる際「冥装」を得た状態で墓地に置かれる。¶装備 : これが緑の間「パワー+3000」を得る。</text:p>
          </table:table-cell>
          <table:table-cell table:style-name="ce8" office:value-type="string" calcext:value-type="string">
            <text:p>魔力化</text:p>
          </table:table-cell>
          <table:table-cell table:formula="of:=IFERROR(VLOOKUP([.$V295];[$遺業能力番号.$A$1:$遺業能力番号.$B$9];2;0);0)" office:value-type="float" office:value="1" calcext:value-type="float">
            <text:p>1</text:p>
          </table:table-cell>
          <table:table-cell office:value-type="string" calcext:value-type="string">
            <text:p>https://one-draw.jp/ijinden/cardlist/003/card/03_066.png</text:p>
          </table:table-cell>
          <table:table-cell table:formula="of:=CONCATENATE([$JSON.$A$1];[.$C295];[$JSON.$B$1];[.$E295];[$JSON.$C$1];[.$F295];[$JSON.$D$1];IF(ISNA([.$S295]);&quot;null&quot;;&quot;&quot;&quot;&quot;&amp;[.$S295]&amp;&quot;&quot;&quot;&quot;);[$JSON.$E$1];[.$U295];[$JSON.$F$1];IF(ISNA([.$V295]);&quot;null&quot;;&quot;&quot;&quot;&quot;&amp;[.$V295]&amp;&quot;&quot;&quot;&quot;);[$JSON.$G$1];[.$X295];[$JSON.$H$1];[.$H295];[$JSON.$I$1];[.J295];[$JSON.$J$1];[.$L295];[$JSON.$K$1];[.$O295];[$JSON.$L$1];[.$N295];[$JSON.$M$1];[.$R295];[$JSON.$N$1];[.$T295];[$JSON.$O$1];[.$W295];[$JSON.$P$1];[.$A295];[$JSON.$Q$1];[.$B295];[$JSON.$R$1])" office:value-type="string" office:string-value="{&quot;id&quot;:&quot;3-66&quot;,&quot;name&quot;:&quot;クロロオーラ&quot;,&quot;kana&quot;:&quot;くろろおーら&quot;,&quot;traitText&quot;:null,&quot;ruleText&quot;:&quot;1ドローする。¶マホウ使用によって墓地に置かれる際「冥装」を得た状態で墓地に置かれる。¶装備 : これが緑の間「パワー+3000」を得る。&quot;,&quot;legacyText&quot;:&quot;魔力化&quot;,&quot;imageUrl&quot;:&quot;https://one-draw.jp/ijinden/cardlist/003/card/03_066.png&quot;,&quot;expansion&quot;:35,&quot;rarity&quot;:1,&quot;type&quot;:3,&quot;level&quot;:2,&quot;color&quot;:4,&quot;term&quot;:0,&quot;trait&quot;:0,&quot;legacy&quot;:1,&quot;orderTable&quot;:294,&quot;orderDeck&quot;:298}," calcext:value-type="string">
            <text:p>{"id":"3-66","name":"クロロオーラ","kana":"くろろおーら","traitText":null,"ruleText":"1ドローする。¶マホウ使用によって墓地に置かれる際「冥装」を得た状態で墓地に置かれる。¶装備 : これが緑の間「パワー+3000」を得る。","legacyText":"魔力化","imageUrl":"https://one-draw.jp/ijinden/cardlist/003/card/03_066.png","expansion":35,"rarity":1,"type":3,"level":2,"color":4,"term":0,"trait":0,"legacy":1,"orderTable":294,"orderDeck":298},</text:p>
          </table:table-cell>
          <table:table-cell table:number-columns-repeated="16347"/>
        </table:table-row>
        <table:table-row table:style-name="ro2">
          <table:table-cell office:value-type="float" office:value="295" calcext:value-type="float">
            <text:p>295</text:p>
          </table:table-cell>
          <table:table-cell office:value-type="float" office:value="299" calcext:value-type="float">
            <text:p>299</text:p>
          </table:table-cell>
          <table:table-cell office:value-type="string" calcext:value-type="string">
            <text:p>3-67</text:p>
          </table:table-cell>
          <table:table-cell office:value-type="float" office:value="67" calcext:value-type="float">
            <text:p>67</text:p>
          </table:table-cell>
          <table:table-cell office:value-type="string" calcext:value-type="string">
            <text:p>パシフィック</text:p>
          </table:table-cell>
          <table:table-cell office:value-type="string" calcext:value-type="string">
            <text:p>ぱしふぃっく</text:p>
          </table:table-cell>
          <table:table-cell office:value-type="string" calcext:value-type="string">
            <text:p>第３弾ブースターパック</text:p>
          </table:table-cell>
          <table:table-cell table:formula="of:=VLOOKUP([.G296];[$収録番号.$A$1:$収録番号.$B$9];2;0)" office:value-type="float" office:value="35" calcext:value-type="float">
            <text:p>35</text:p>
          </table:table-cell>
          <table:table-cell office:value-type="string" calcext:value-type="string">
            <text:p>N</text:p>
          </table:table-cell>
          <table:table-cell table:formula="of:=VLOOKUP([.I296];[$レアリティ番号.$A$1:$レアリティ番号.$B$4];2;0)" office:value-type="float" office:value="1" calcext:value-type="float">
            <text:p>1</text:p>
          </table:table-cell>
          <table:table-cell office:value-type="string" calcext:value-type="string">
            <text:p>マホウ</text:p>
          </table:table-cell>
          <table:table-cell table:formula="of:=VLOOKUP([.K296];[$種類番号.$A$1:$種類番号.$B$4];2;0)" office:value-type="float" office:value="3" calcext:value-type="float">
            <text:p>3</text:p>
          </table:table-cell>
          <table:table-cell office:value-type="string" calcext:value-type="string">
            <text:p>黄</text:p>
          </table:table-cell>
          <table:table-cell table:formula="of:=VLOOKUP([.M296];[$色番号.$A$1:$色番号.$B$10];2;0)" office:value-type="float" office:value="8" calcext:value-type="float">
            <text:p>8</text:p>
          </table:table-cell>
          <table:table-cell office:value-type="float" office:value="2" calcext:value-type="float">
            <text:p>2</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Q29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96];[$特性番号.$A$1:$特性番号.$B$8];2;0);0)" office:value-type="float" office:value="0" calcext:value-type="float">
            <text:p>0</text:p>
          </table:table-cell>
          <table:table-cell office:value-type="string" calcext:value-type="string">
            <text:p>『プレッシャー』能力を持つイジン1体を指定して発動できる。そのイジンがアタッカーなら、そのイジンを山札の下に戻す。そうでなければ、そのイジンを寝かせる。</text:p>
          </table:table-cell>
          <table:table-cell table:style-name="ce8" office:value-type="string" calcext:value-type="string">
            <text:p>冥府発動</text:p>
          </table:table-cell>
          <table:table-cell table:formula="of:=IFERROR(VLOOKUP([.$V296];[$遺業能力番号.$A$1:$遺業能力番号.$B$9];2;0);0)" office:value-type="float" office:value="2" calcext:value-type="float">
            <text:p>2</text:p>
          </table:table-cell>
          <table:table-cell office:value-type="string" calcext:value-type="string">
            <text:p>https://one-draw.jp/ijinden/cardlist/003/card/03_067.png</text:p>
          </table:table-cell>
          <table:table-cell table:formula="of:=CONCATENATE([$JSON.$A$1];[.$C296];[$JSON.$B$1];[.$E296];[$JSON.$C$1];[.$F296];[$JSON.$D$1];IF(ISNA([.$S296]);&quot;null&quot;;&quot;&quot;&quot;&quot;&amp;[.$S296]&amp;&quot;&quot;&quot;&quot;);[$JSON.$E$1];[.$U296];[$JSON.$F$1];IF(ISNA([.$V296]);&quot;null&quot;;&quot;&quot;&quot;&quot;&amp;[.$V296]&amp;&quot;&quot;&quot;&quot;);[$JSON.$G$1];[.$X296];[$JSON.$H$1];[.$H296];[$JSON.$I$1];[.J296];[$JSON.$J$1];[.$L296];[$JSON.$K$1];[.$O296];[$JSON.$L$1];[.$N296];[$JSON.$M$1];[.$R296];[$JSON.$N$1];[.$T296];[$JSON.$O$1];[.$W296];[$JSON.$P$1];[.$A296];[$JSON.$Q$1];[.$B296];[$JSON.$R$1])" office:value-type="string" office:string-value="{&quot;id&quot;:&quot;3-67&quot;,&quot;name&quot;:&quot;パシフィック&quot;,&quot;kana&quot;:&quot;ぱしふぃっく&quot;,&quot;traitText&quot;:null,&quot;ruleText&quot;:&quot;『プレッシャー』能力を持つイジン1体を指定して発動できる。そのイジンがアタッカーなら、そのイジンを山札の下に戻す。そうでなければ、そのイジンを寝かせる。&quot;,&quot;legacyText&quot;:&quot;冥府発動&quot;,&quot;imageUrl&quot;:&quot;https://one-draw.jp/ijinden/cardlist/003/card/03_067.png&quot;,&quot;expansion&quot;:35,&quot;rarity&quot;:1,&quot;type&quot;:3,&quot;level&quot;:2,&quot;color&quot;:8,&quot;term&quot;:0,&quot;trait&quot;:0,&quot;legacy&quot;:2,&quot;orderTable&quot;:295,&quot;orderDeck&quot;:299}," calcext:value-type="string">
            <text:p>{"id":"3-67","name":"パシフィック","kana":"ぱしふぃっく","traitText":null,"ruleText":"『プレッシャー』能力を持つイジン1体を指定して発動できる。そのイジンがアタッカーなら、そのイジンを山札の下に戻す。そうでなければ、そのイジンを寝かせる。","legacyText":"冥府発動","imageUrl":"https://one-draw.jp/ijinden/cardlist/003/card/03_067.png","expansion":35,"rarity":1,"type":3,"level":2,"color":8,"term":0,"trait":0,"legacy":2,"orderTable":295,"orderDeck":299},</text:p>
          </table:table-cell>
          <table:table-cell table:number-columns-repeated="16347"/>
        </table:table-row>
        <table:table-row table:style-name="ro2">
          <table:table-cell office:value-type="float" office:value="296" calcext:value-type="float">
            <text:p>296</text:p>
          </table:table-cell>
          <table:table-cell office:value-type="float" office:value="301" calcext:value-type="float">
            <text:p>301</text:p>
          </table:table-cell>
          <table:table-cell office:value-type="string" calcext:value-type="string">
            <text:p>3-68</text:p>
          </table:table-cell>
          <table:table-cell office:value-type="float" office:value="68" calcext:value-type="float">
            <text:p>68</text:p>
          </table:table-cell>
          <table:table-cell office:value-type="string" calcext:value-type="string">
            <text:p>ジオオーラ</text:p>
          </table:table-cell>
          <table:table-cell office:value-type="string" calcext:value-type="string">
            <text:p>じおおーら</text:p>
          </table:table-cell>
          <table:table-cell office:value-type="string" calcext:value-type="string">
            <text:p>第３弾ブースターパック</text:p>
          </table:table-cell>
          <table:table-cell table:formula="of:=VLOOKUP([.G297];[$収録番号.$A$1:$収録番号.$B$9];2;0)" office:value-type="float" office:value="35" calcext:value-type="float">
            <text:p>35</text:p>
          </table:table-cell>
          <table:table-cell office:value-type="string" calcext:value-type="string">
            <text:p>R</text:p>
          </table:table-cell>
          <table:table-cell table:formula="of:=VLOOKUP([.I297];[$レアリティ番号.$A$1:$レアリティ番号.$B$4];2;0)" office:value-type="float" office:value="2" calcext:value-type="float">
            <text:p>2</text:p>
          </table:table-cell>
          <table:table-cell office:value-type="string" calcext:value-type="string">
            <text:p>マホウ</text:p>
          </table:table-cell>
          <table:table-cell table:formula="of:=VLOOKUP([.K297];[$種類番号.$A$1:$種類番号.$B$4];2;0)" office:value-type="float" office:value="3" calcext:value-type="float">
            <text:p>3</text:p>
          </table:table-cell>
          <table:table-cell office:value-type="string" calcext:value-type="string">
            <text:p>黄</text:p>
          </table:table-cell>
          <table:table-cell table:formula="of:=VLOOKUP([.M297];[$色番号.$A$1:$色番号.$B$10];2;0)" office:value-type="float" office:value="8" calcext:value-type="float">
            <text:p>8</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29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97];[$特性番号.$A$1:$特性番号.$B$8];2;0);0)" office:value-type="float" office:value="0" calcext:value-type="float">
            <text:p>0</text:p>
          </table:table-cell>
          <table:table-cell office:value-type="string" calcext:value-type="string">
            <text:p>1ドローする。¶マホウ使用によって墓地に置かれる際「冥装」を得た状態で墓地に置かれる。¶装備 : これが黄の間「ウォッチャー ブロック+2000」を得る。</text:p>
          </table:table-cell>
          <table:table-cell table:style-name="ce8" office:value-type="string" calcext:value-type="string">
            <text:p>魔力化</text:p>
          </table:table-cell>
          <table:table-cell table:formula="of:=IFERROR(VLOOKUP([.$V297];[$遺業能力番号.$A$1:$遺業能力番号.$B$9];2;0);0)" office:value-type="float" office:value="1" calcext:value-type="float">
            <text:p>1</text:p>
          </table:table-cell>
          <table:table-cell office:value-type="string" calcext:value-type="string">
            <text:p>https://one-draw.jp/ijinden/cardlist/003/card/03_068.png</text:p>
          </table:table-cell>
          <table:table-cell table:formula="of:=CONCATENATE([$JSON.$A$1];[.$C297];[$JSON.$B$1];[.$E297];[$JSON.$C$1];[.$F297];[$JSON.$D$1];IF(ISNA([.$S297]);&quot;null&quot;;&quot;&quot;&quot;&quot;&amp;[.$S297]&amp;&quot;&quot;&quot;&quot;);[$JSON.$E$1];[.$U297];[$JSON.$F$1];IF(ISNA([.$V297]);&quot;null&quot;;&quot;&quot;&quot;&quot;&amp;[.$V297]&amp;&quot;&quot;&quot;&quot;);[$JSON.$G$1];[.$X297];[$JSON.$H$1];[.$H297];[$JSON.$I$1];[.J297];[$JSON.$J$1];[.$L297];[$JSON.$K$1];[.$O297];[$JSON.$L$1];[.$N297];[$JSON.$M$1];[.$R297];[$JSON.$N$1];[.$T297];[$JSON.$O$1];[.$W297];[$JSON.$P$1];[.$A297];[$JSON.$Q$1];[.$B297];[$JSON.$R$1])" office:value-type="string" office:string-value="{&quot;id&quot;:&quot;3-68&quot;,&quot;name&quot;:&quot;ジオオーラ&quot;,&quot;kana&quot;:&quot;じおおーら&quot;,&quot;traitText&quot;:null,&quot;ruleText&quot;:&quot;1ドローする。¶マホウ使用によって墓地に置かれる際「冥装」を得た状態で墓地に置かれる。¶装備 : これが黄の間「ウォッチャー ブロック+2000」を得る。&quot;,&quot;legacyText&quot;:&quot;魔力化&quot;,&quot;imageUrl&quot;:&quot;https://one-draw.jp/ijinden/cardlist/003/card/03_068.png&quot;,&quot;expansion&quot;:35,&quot;rarity&quot;:2,&quot;type&quot;:3,&quot;level&quot;:2,&quot;color&quot;:8,&quot;term&quot;:0,&quot;trait&quot;:0,&quot;legacy&quot;:1,&quot;orderTable&quot;:296,&quot;orderDeck&quot;:301}," calcext:value-type="string">
            <text:p>{"id":"3-68","name":"ジオオーラ","kana":"じおおーら","traitText":null,"ruleText":"1ドローする。¶マホウ使用によって墓地に置かれる際「冥装」を得た状態で墓地に置かれる。¶装備 : これが黄の間「ウォッチャー ブロック+2000」を得る。","legacyText":"魔力化","imageUrl":"https://one-draw.jp/ijinden/cardlist/003/card/03_068.png","expansion":35,"rarity":2,"type":3,"level":2,"color":8,"term":0,"trait":0,"legacy":1,"orderTable":296,"orderDeck":301},</text:p>
          </table:table-cell>
          <table:table-cell table:number-columns-repeated="16347"/>
        </table:table-row>
        <table:table-row table:style-name="ro2">
          <table:table-cell office:value-type="float" office:value="297" calcext:value-type="float">
            <text:p>297</text:p>
          </table:table-cell>
          <table:table-cell office:value-type="float" office:value="317" calcext:value-type="float">
            <text:p>317</text:p>
          </table:table-cell>
          <table:table-cell office:value-type="string" calcext:value-type="string">
            <text:p>3-69</text:p>
          </table:table-cell>
          <table:table-cell office:value-type="float" office:value="69" calcext:value-type="float">
            <text:p>69</text:p>
          </table:table-cell>
          <table:table-cell office:value-type="string" calcext:value-type="string">
            <text:p>コーザリティ</text:p>
          </table:table-cell>
          <table:table-cell office:value-type="string" calcext:value-type="string">
            <text:p>こーざりてぃ</text:p>
          </table:table-cell>
          <table:table-cell office:value-type="string" calcext:value-type="string">
            <text:p>第３弾ブースターパック</text:p>
          </table:table-cell>
          <table:table-cell table:formula="of:=VLOOKUP([.G298];[$収録番号.$A$1:$収録番号.$B$9];2;0)" office:value-type="float" office:value="35" calcext:value-type="float">
            <text:p>35</text:p>
          </table:table-cell>
          <table:table-cell office:value-type="string" calcext:value-type="string">
            <text:p>N</text:p>
          </table:table-cell>
          <table:table-cell table:formula="of:=VLOOKUP([.I298];[$レアリティ番号.$A$1:$レアリティ番号.$B$4];2;0)" office:value-type="float" office:value="1" calcext:value-type="float">
            <text:p>1</text:p>
          </table:table-cell>
          <table:table-cell office:value-type="string" calcext:value-type="string">
            <text:p>マホウ</text:p>
          </table:table-cell>
          <table:table-cell table:formula="of:=VLOOKUP([.K298];[$種類番号.$A$1:$種類番号.$B$4];2;0)" office:value-type="float" office:value="3" calcext:value-type="float">
            <text:p>3</text:p>
          </table:table-cell>
          <table:table-cell office:value-type="string" calcext:value-type="string">
            <text:p>紫</text:p>
          </table:table-cell>
          <table:table-cell table:formula="of:=VLOOKUP([.M298];[$色番号.$A$1:$色番号.$B$10];2;0)" office:value-type="float" office:value="16" calcext:value-type="float">
            <text:p>16</text:p>
          </table:table-cell>
          <table:table-cell office:value-type="float" office:value="3" calcext:value-type="float">
            <text:p>3</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Q29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98];[$特性番号.$A$1:$特性番号.$B$8];2;0);0)" office:value-type="float" office:value="0" calcext:value-type="float">
            <text:p>0</text:p>
          </table:table-cell>
          <table:table-cell office:value-type="string" calcext:value-type="string">
            <text:p>「自分の山札の上から2枚を墓地に置く」か「相手の山札の上から2枚を墓地に置く」を発揮して、墓地のイジン1体を手札に戻す。</text:p>
          </table:table-cell>
          <table:table-cell table:style-name="ce8" office:value-type="string" calcext:value-type="string">
            <text:p>冥府発動</text:p>
          </table:table-cell>
          <table:table-cell table:formula="of:=IFERROR(VLOOKUP([.$V298];[$遺業能力番号.$A$1:$遺業能力番号.$B$9];2;0);0)" office:value-type="float" office:value="2" calcext:value-type="float">
            <text:p>2</text:p>
          </table:table-cell>
          <table:table-cell office:value-type="string" calcext:value-type="string">
            <text:p>https://one-draw.jp/ijinden/cardlist/003/card/03_069.png</text:p>
          </table:table-cell>
          <table:table-cell table:formula="of:=CONCATENATE([$JSON.$A$1];[.$C298];[$JSON.$B$1];[.$E298];[$JSON.$C$1];[.$F298];[$JSON.$D$1];IF(ISNA([.$S298]);&quot;null&quot;;&quot;&quot;&quot;&quot;&amp;[.$S298]&amp;&quot;&quot;&quot;&quot;);[$JSON.$E$1];[.$U298];[$JSON.$F$1];IF(ISNA([.$V298]);&quot;null&quot;;&quot;&quot;&quot;&quot;&amp;[.$V298]&amp;&quot;&quot;&quot;&quot;);[$JSON.$G$1];[.$X298];[$JSON.$H$1];[.$H298];[$JSON.$I$1];[.J298];[$JSON.$J$1];[.$L298];[$JSON.$K$1];[.$O298];[$JSON.$L$1];[.$N298];[$JSON.$M$1];[.$R298];[$JSON.$N$1];[.$T298];[$JSON.$O$1];[.$W298];[$JSON.$P$1];[.$A298];[$JSON.$Q$1];[.$B298];[$JSON.$R$1])" office:value-type="string" office:string-value="{&quot;id&quot;:&quot;3-69&quot;,&quot;name&quot;:&quot;コーザリティ&quot;,&quot;kana&quot;:&quot;こーざりてぃ&quot;,&quot;traitText&quot;:null,&quot;ruleText&quot;:&quot;「自分の山札の上から2枚を墓地に置く」か「相手の山札の上から2枚を墓地に置く」を発揮して、墓地のイジン1体を手札に戻す。&quot;,&quot;legacyText&quot;:&quot;冥府発動&quot;,&quot;imageUrl&quot;:&quot;https://one-draw.jp/ijinden/cardlist/003/card/03_069.png&quot;,&quot;expansion&quot;:35,&quot;rarity&quot;:1,&quot;type&quot;:3,&quot;level&quot;:3,&quot;color&quot;:16,&quot;term&quot;:0,&quot;trait&quot;:0,&quot;legacy&quot;:2,&quot;orderTable&quot;:297,&quot;orderDeck&quot;:317}," calcext:value-type="string">
            <text:p>{"id":"3-69","name":"コーザリティ","kana":"こーざりてぃ","traitText":null,"ruleText":"「自分の山札の上から2枚を墓地に置く」か「相手の山札の上から2枚を墓地に置く」を発揮して、墓地のイジン1体を手札に戻す。","legacyText":"冥府発動","imageUrl":"https://one-draw.jp/ijinden/cardlist/003/card/03_069.png","expansion":35,"rarity":1,"type":3,"level":3,"color":16,"term":0,"trait":0,"legacy":2,"orderTable":297,"orderDeck":317},</text:p>
          </table:table-cell>
          <table:table-cell table:number-columns-repeated="16347"/>
        </table:table-row>
        <table:table-row table:style-name="ro2">
          <table:table-cell office:value-type="float" office:value="298" calcext:value-type="float">
            <text:p>298</text:p>
          </table:table-cell>
          <table:table-cell office:value-type="float" office:value="302" calcext:value-type="float">
            <text:p>302</text:p>
          </table:table-cell>
          <table:table-cell office:value-type="string" calcext:value-type="string">
            <text:p>3-70</text:p>
          </table:table-cell>
          <table:table-cell office:value-type="float" office:value="70" calcext:value-type="float">
            <text:p>70</text:p>
          </table:table-cell>
          <table:table-cell office:value-type="string" calcext:value-type="string">
            <text:p>エアロオーラ</text:p>
          </table:table-cell>
          <table:table-cell office:value-type="string" calcext:value-type="string">
            <text:p>えあろおーら</text:p>
          </table:table-cell>
          <table:table-cell office:value-type="string" calcext:value-type="string">
            <text:p>第３弾ブースターパック</text:p>
          </table:table-cell>
          <table:table-cell table:formula="of:=VLOOKUP([.G299];[$収録番号.$A$1:$収録番号.$B$9];2;0)" office:value-type="float" office:value="35" calcext:value-type="float">
            <text:p>35</text:p>
          </table:table-cell>
          <table:table-cell office:value-type="string" calcext:value-type="string">
            <text:p>R</text:p>
          </table:table-cell>
          <table:table-cell table:formula="of:=VLOOKUP([.I299];[$レアリティ番号.$A$1:$レアリティ番号.$B$4];2;0)" office:value-type="float" office:value="2" calcext:value-type="float">
            <text:p>2</text:p>
          </table:table-cell>
          <table:table-cell office:value-type="string" calcext:value-type="string">
            <text:p>マホウ</text:p>
          </table:table-cell>
          <table:table-cell table:formula="of:=VLOOKUP([.K299];[$種類番号.$A$1:$種類番号.$B$4];2;0)" office:value-type="float" office:value="3" calcext:value-type="float">
            <text:p>3</text:p>
          </table:table-cell>
          <table:table-cell office:value-type="string" calcext:value-type="string">
            <text:p>紫</text:p>
          </table:table-cell>
          <table:table-cell table:formula="of:=VLOOKUP([.M299];[$色番号.$A$1:$色番号.$B$10];2;0)" office:value-type="float" office:value="16" calcext:value-type="float">
            <text:p>16</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29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99];[$特性番号.$A$1:$特性番号.$B$8];2;0);0)" office:value-type="float" office:value="0" calcext:value-type="float">
            <text:p>0</text:p>
          </table:table-cell>
          <table:table-cell office:value-type="string" calcext:value-type="string">
            <text:p>1ドローする。¶マホウ使用によって墓地に置かれる際「冥装」を得た状態で墓地に置かれる。¶装備 : これが紫の間「ダブルプレッシャー アタック+2000」を得る。</text:p>
          </table:table-cell>
          <table:table-cell table:style-name="ce8" office:value-type="string" calcext:value-type="string">
            <text:p>魔力化</text:p>
          </table:table-cell>
          <table:table-cell table:formula="of:=IFERROR(VLOOKUP([.$V299];[$遺業能力番号.$A$1:$遺業能力番号.$B$9];2;0);0)" office:value-type="float" office:value="1" calcext:value-type="float">
            <text:p>1</text:p>
          </table:table-cell>
          <table:table-cell office:value-type="string" calcext:value-type="string">
            <text:p>https://one-draw.jp/ijinden/cardlist/003/card/03_070.png</text:p>
          </table:table-cell>
          <table:table-cell table:formula="of:=CONCATENATE([$JSON.$A$1];[.$C299];[$JSON.$B$1];[.$E299];[$JSON.$C$1];[.$F299];[$JSON.$D$1];IF(ISNA([.$S299]);&quot;null&quot;;&quot;&quot;&quot;&quot;&amp;[.$S299]&amp;&quot;&quot;&quot;&quot;);[$JSON.$E$1];[.$U299];[$JSON.$F$1];IF(ISNA([.$V299]);&quot;null&quot;;&quot;&quot;&quot;&quot;&amp;[.$V299]&amp;&quot;&quot;&quot;&quot;);[$JSON.$G$1];[.$X299];[$JSON.$H$1];[.$H299];[$JSON.$I$1];[.J299];[$JSON.$J$1];[.$L299];[$JSON.$K$1];[.$O299];[$JSON.$L$1];[.$N299];[$JSON.$M$1];[.$R299];[$JSON.$N$1];[.$T299];[$JSON.$O$1];[.$W299];[$JSON.$P$1];[.$A299];[$JSON.$Q$1];[.$B299];[$JSON.$R$1])" office:value-type="string" office:string-value="{&quot;id&quot;:&quot;3-70&quot;,&quot;name&quot;:&quot;エアロオーラ&quot;,&quot;kana&quot;:&quot;えあろおーら&quot;,&quot;traitText&quot;:null,&quot;ruleText&quot;:&quot;1ドローする。¶マホウ使用によって墓地に置かれる際「冥装」を得た状態で墓地に置かれる。¶装備 : これが紫の間「ダブルプレッシャー アタック+2000」を得る。&quot;,&quot;legacyText&quot;:&quot;魔力化&quot;,&quot;imageUrl&quot;:&quot;https://one-draw.jp/ijinden/cardlist/003/card/03_070.png&quot;,&quot;expansion&quot;:35,&quot;rarity&quot;:2,&quot;type&quot;:3,&quot;level&quot;:2,&quot;color&quot;:16,&quot;term&quot;:0,&quot;trait&quot;:0,&quot;legacy&quot;:1,&quot;orderTable&quot;:298,&quot;orderDeck&quot;:302}," calcext:value-type="string">
            <text:p>{"id":"3-70","name":"エアロオーラ","kana":"えあろおーら","traitText":null,"ruleText":"1ドローする。¶マホウ使用によって墓地に置かれる際「冥装」を得た状態で墓地に置かれる。¶装備 : これが紫の間「ダブルプレッシャー アタック+2000」を得る。","legacyText":"魔力化","imageUrl":"https://one-draw.jp/ijinden/cardlist/003/card/03_070.png","expansion":35,"rarity":2,"type":3,"level":2,"color":16,"term":0,"trait":0,"legacy":1,"orderTable":298,"orderDeck":302},</text:p>
          </table:table-cell>
          <table:table-cell table:number-columns-repeated="16347"/>
        </table:table-row>
        <table:table-row table:style-name="ro2">
          <table:table-cell office:value-type="float" office:value="299" calcext:value-type="float">
            <text:p>299</text:p>
          </table:table-cell>
          <table:table-cell office:value-type="float" office:value="347" calcext:value-type="float">
            <text:p>347</text:p>
          </table:table-cell>
          <table:table-cell office:value-type="string" calcext:value-type="string">
            <text:p>3-71</text:p>
          </table:table-cell>
          <table:table-cell office:value-type="float" office:value="71" calcext:value-type="float">
            <text:p>71</text:p>
          </table:table-cell>
          <table:table-cell office:value-type="string" calcext:value-type="string">
            <text:p>喜びの種</text:p>
          </table:table-cell>
          <table:table-cell office:value-type="string" calcext:value-type="string">
            <text:p>よろこびのたね</text:p>
          </table:table-cell>
          <table:table-cell office:value-type="string" calcext:value-type="string">
            <text:p>第３弾ブースターパック</text:p>
          </table:table-cell>
          <table:table-cell table:formula="of:=VLOOKUP([.G300];[$収録番号.$A$1:$収録番号.$B$9];2;0)" office:value-type="float" office:value="35" calcext:value-type="float">
            <text:p>35</text:p>
          </table:table-cell>
          <table:table-cell office:value-type="string" calcext:value-type="string">
            <text:p>N</text:p>
          </table:table-cell>
          <table:table-cell table:formula="of:=VLOOKUP([.I300];[$レアリティ番号.$A$1:$レアリティ番号.$B$4];2;0)" office:value-type="float" office:value="1" calcext:value-type="float">
            <text:p>1</text:p>
          </table:table-cell>
          <table:table-cell office:value-type="string" calcext:value-type="string">
            <text:p>マリョク</text:p>
          </table:table-cell>
          <table:table-cell table:formula="of:=VLOOKUP([.K300];[$種類番号.$A$1:$種類番号.$B$4];2;0)" office:value-type="float" office:value="4" calcext:value-type="float">
            <text:p>4</text:p>
          </table:table-cell>
          <table:table-cell office:value-type="string" calcext:value-type="string">
            <text:p>赤</text:p>
          </table:table-cell>
          <table:table-cell table:formula="of:=VLOOKUP([.M300];[$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0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00];[$特性番号.$A$1:$特性番号.$B$8];2;0);0)" office:value-type="float" office:value="0" calcext:value-type="float">
            <text:p>0</text:p>
          </table:table-cell>
          <table:table-cell office:value-type="string" calcext:value-type="string">
            <text:p>魔力ゾーンに置かれたとき、自分の山札の上から1枚を裏のまま魔力ゾーンに置く。</text:p>
          </table:table-cell>
          <table:table-cell table:style-name="ce8" office:value-type="string" calcext:value-type="string">
            <text:p>魔力化</text:p>
          </table:table-cell>
          <table:table-cell table:formula="of:=IFERROR(VLOOKUP([.$V300];[$遺業能力番号.$A$1:$遺業能力番号.$B$9];2;0);0)" office:value-type="float" office:value="1" calcext:value-type="float">
            <text:p>1</text:p>
          </table:table-cell>
          <table:table-cell office:value-type="string" calcext:value-type="string">
            <text:p>https://one-draw.jp/ijinden/cardlist/003/card/03_071.png</text:p>
          </table:table-cell>
          <table:table-cell table:formula="of:=CONCATENATE([$JSON.$A$1];[.$C300];[$JSON.$B$1];[.$E300];[$JSON.$C$1];[.$F300];[$JSON.$D$1];IF(ISNA([.$S300]);&quot;null&quot;;&quot;&quot;&quot;&quot;&amp;[.$S300]&amp;&quot;&quot;&quot;&quot;);[$JSON.$E$1];[.$U300];[$JSON.$F$1];IF(ISNA([.$V300]);&quot;null&quot;;&quot;&quot;&quot;&quot;&amp;[.$V300]&amp;&quot;&quot;&quot;&quot;);[$JSON.$G$1];[.$X300];[$JSON.$H$1];[.$H300];[$JSON.$I$1];[.J300];[$JSON.$J$1];[.$L300];[$JSON.$K$1];[.$O300];[$JSON.$L$1];[.$N300];[$JSON.$M$1];[.$R300];[$JSON.$N$1];[.$T300];[$JSON.$O$1];[.$W300];[$JSON.$P$1];[.$A300];[$JSON.$Q$1];[.$B300];[$JSON.$R$1])" office:value-type="string" office:string-value="{&quot;id&quot;:&quot;3-71&quot;,&quot;name&quot;:&quot;喜びの種&quot;,&quot;kana&quot;:&quot;よろこびのたね&quot;,&quot;traitText&quot;:null,&quot;ruleText&quot;:&quot;魔力ゾーンに置かれたとき、自分の山札の上から1枚を裏のまま魔力ゾーンに置く。&quot;,&quot;legacyText&quot;:&quot;魔力化&quot;,&quot;imageUrl&quot;:&quot;https://one-draw.jp/ijinden/cardlist/003/card/03_071.png&quot;,&quot;expansion&quot;:35,&quot;rarity&quot;:1,&quot;type&quot;:4,&quot;level&quot;:1,&quot;color&quot;:1,&quot;term&quot;:0,&quot;trait&quot;:0,&quot;legacy&quot;:1,&quot;orderTable&quot;:299,&quot;orderDeck&quot;:347}," calcext:value-type="string">
            <text:p>{"id":"3-71","name":"喜びの種","kana":"よろこびのたね","traitText":null,"ruleText":"魔力ゾーンに置かれたとき、自分の山札の上から1枚を裏のまま魔力ゾーンに置く。","legacyText":"魔力化","imageUrl":"https://one-draw.jp/ijinden/cardlist/003/card/03_071.png","expansion":35,"rarity":1,"type":4,"level":1,"color":1,"term":0,"trait":0,"legacy":1,"orderTable":299,"orderDeck":347},</text:p>
          </table:table-cell>
          <table:table-cell table:number-columns-repeated="16347"/>
        </table:table-row>
        <table:table-row table:style-name="ro2">
          <table:table-cell office:value-type="float" office:value="300" calcext:value-type="float">
            <text:p>300</text:p>
          </table:table-cell>
          <table:table-cell office:value-type="float" office:value="353" calcext:value-type="float">
            <text:p>353</text:p>
          </table:table-cell>
          <table:table-cell office:value-type="string" calcext:value-type="string">
            <text:p>3-72</text:p>
          </table:table-cell>
          <table:table-cell office:value-type="float" office:value="72" calcext:value-type="float">
            <text:p>72</text:p>
          </table:table-cell>
          <table:table-cell office:value-type="string" calcext:value-type="string">
            <text:p>怖れの種</text:p>
          </table:table-cell>
          <table:table-cell office:value-type="string" calcext:value-type="string">
            <text:p>おそれのたね</text:p>
          </table:table-cell>
          <table:table-cell office:value-type="string" calcext:value-type="string">
            <text:p>第３弾ブースターパック</text:p>
          </table:table-cell>
          <table:table-cell table:formula="of:=VLOOKUP([.G301];[$収録番号.$A$1:$収録番号.$B$9];2;0)" office:value-type="float" office:value="35" calcext:value-type="float">
            <text:p>35</text:p>
          </table:table-cell>
          <table:table-cell office:value-type="string" calcext:value-type="string">
            <text:p>N</text:p>
          </table:table-cell>
          <table:table-cell table:formula="of:=VLOOKUP([.I301];[$レアリティ番号.$A$1:$レアリティ番号.$B$4];2;0)" office:value-type="float" office:value="1" calcext:value-type="float">
            <text:p>1</text:p>
          </table:table-cell>
          <table:table-cell office:value-type="string" calcext:value-type="string">
            <text:p>マリョク</text:p>
          </table:table-cell>
          <table:table-cell table:formula="of:=VLOOKUP([.K301];[$種類番号.$A$1:$種類番号.$B$4];2;0)" office:value-type="float" office:value="4" calcext:value-type="float">
            <text:p>4</text:p>
          </table:table-cell>
          <table:table-cell office:value-type="string" calcext:value-type="string">
            <text:p>青</text:p>
          </table:table-cell>
          <table:table-cell table:formula="of:=VLOOKUP([.M301];[$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0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01];[$特性番号.$A$1:$特性番号.$B$8];2;0);0)" office:value-type="float" office:value="0" calcext:value-type="float">
            <text:p>0</text:p>
          </table:table-cell>
          <table:table-cell office:value-type="string" calcext:value-type="string">
            <text:p>魔力ゾーンに置かれたとき、自分の山札の上から1枚を裏のまま魔力ゾーンに置く。</text:p>
          </table:table-cell>
          <table:table-cell table:style-name="ce8" office:value-type="string" calcext:value-type="string">
            <text:p>魔力化</text:p>
          </table:table-cell>
          <table:table-cell table:formula="of:=IFERROR(VLOOKUP([.$V301];[$遺業能力番号.$A$1:$遺業能力番号.$B$9];2;0);0)" office:value-type="float" office:value="1" calcext:value-type="float">
            <text:p>1</text:p>
          </table:table-cell>
          <table:table-cell office:value-type="string" calcext:value-type="string">
            <text:p>https://one-draw.jp/ijinden/cardlist/003/card/03_072.png</text:p>
          </table:table-cell>
          <table:table-cell table:formula="of:=CONCATENATE([$JSON.$A$1];[.$C301];[$JSON.$B$1];[.$E301];[$JSON.$C$1];[.$F301];[$JSON.$D$1];IF(ISNA([.$S301]);&quot;null&quot;;&quot;&quot;&quot;&quot;&amp;[.$S301]&amp;&quot;&quot;&quot;&quot;);[$JSON.$E$1];[.$U301];[$JSON.$F$1];IF(ISNA([.$V301]);&quot;null&quot;;&quot;&quot;&quot;&quot;&amp;[.$V301]&amp;&quot;&quot;&quot;&quot;);[$JSON.$G$1];[.$X301];[$JSON.$H$1];[.$H301];[$JSON.$I$1];[.J301];[$JSON.$J$1];[.$L301];[$JSON.$K$1];[.$O301];[$JSON.$L$1];[.$N301];[$JSON.$M$1];[.$R301];[$JSON.$N$1];[.$T301];[$JSON.$O$1];[.$W301];[$JSON.$P$1];[.$A301];[$JSON.$Q$1];[.$B301];[$JSON.$R$1])" office:value-type="string" office:string-value="{&quot;id&quot;:&quot;3-72&quot;,&quot;name&quot;:&quot;怖れの種&quot;,&quot;kana&quot;:&quot;おそれのたね&quot;,&quot;traitText&quot;:null,&quot;ruleText&quot;:&quot;魔力ゾーンに置かれたとき、自分の山札の上から1枚を裏のまま魔力ゾーンに置く。&quot;,&quot;legacyText&quot;:&quot;魔力化&quot;,&quot;imageUrl&quot;:&quot;https://one-draw.jp/ijinden/cardlist/003/card/03_072.png&quot;,&quot;expansion&quot;:35,&quot;rarity&quot;:1,&quot;type&quot;:4,&quot;level&quot;:1,&quot;color&quot;:2,&quot;term&quot;:0,&quot;trait&quot;:0,&quot;legacy&quot;:1,&quot;orderTable&quot;:300,&quot;orderDeck&quot;:353}," calcext:value-type="string">
            <text:p>{"id":"3-72","name":"怖れの種","kana":"おそれのたね","traitText":null,"ruleText":"魔力ゾーンに置かれたとき、自分の山札の上から1枚を裏のまま魔力ゾーンに置く。","legacyText":"魔力化","imageUrl":"https://one-draw.jp/ijinden/cardlist/003/card/03_072.png","expansion":35,"rarity":1,"type":4,"level":1,"color":2,"term":0,"trait":0,"legacy":1,"orderTable":300,"orderDeck":353},</text:p>
          </table:table-cell>
          <table:table-cell table:number-columns-repeated="16347"/>
        </table:table-row>
        <table:table-row table:style-name="ro2">
          <table:table-cell office:value-type="float" office:value="301" calcext:value-type="float">
            <text:p>301</text:p>
          </table:table-cell>
          <table:table-cell office:value-type="float" office:value="359" calcext:value-type="float">
            <text:p>359</text:p>
          </table:table-cell>
          <table:table-cell office:value-type="string" calcext:value-type="string">
            <text:p>3-73</text:p>
          </table:table-cell>
          <table:table-cell office:value-type="float" office:value="73" calcext:value-type="float">
            <text:p>73</text:p>
          </table:table-cell>
          <table:table-cell office:value-type="string" calcext:value-type="string">
            <text:p>怒りの種</text:p>
          </table:table-cell>
          <table:table-cell office:value-type="string" calcext:value-type="string">
            <text:p>いかりのたね</text:p>
          </table:table-cell>
          <table:table-cell office:value-type="string" calcext:value-type="string">
            <text:p>第３弾ブースターパック</text:p>
          </table:table-cell>
          <table:table-cell table:formula="of:=VLOOKUP([.G302];[$収録番号.$A$1:$収録番号.$B$9];2;0)" office:value-type="float" office:value="35" calcext:value-type="float">
            <text:p>35</text:p>
          </table:table-cell>
          <table:table-cell office:value-type="string" calcext:value-type="string">
            <text:p>N</text:p>
          </table:table-cell>
          <table:table-cell table:formula="of:=VLOOKUP([.I302];[$レアリティ番号.$A$1:$レアリティ番号.$B$4];2;0)" office:value-type="float" office:value="1" calcext:value-type="float">
            <text:p>1</text:p>
          </table:table-cell>
          <table:table-cell office:value-type="string" calcext:value-type="string">
            <text:p>マリョク</text:p>
          </table:table-cell>
          <table:table-cell table:formula="of:=VLOOKUP([.K302];[$種類番号.$A$1:$種類番号.$B$4];2;0)" office:value-type="float" office:value="4" calcext:value-type="float">
            <text:p>4</text:p>
          </table:table-cell>
          <table:table-cell office:value-type="string" calcext:value-type="string">
            <text:p>緑</text:p>
          </table:table-cell>
          <table:table-cell table:formula="of:=VLOOKUP([.M302];[$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0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02];[$特性番号.$A$1:$特性番号.$B$8];2;0);0)" office:value-type="float" office:value="0" calcext:value-type="float">
            <text:p>0</text:p>
          </table:table-cell>
          <table:table-cell office:value-type="string" calcext:value-type="string">
            <text:p>魔力ゾーンに置かれたとき、自分の山札の上から1枚を裏のまま魔力ゾーンに置く。</text:p>
          </table:table-cell>
          <table:table-cell table:style-name="ce8" office:value-type="string" calcext:value-type="string">
            <text:p>魔力化</text:p>
          </table:table-cell>
          <table:table-cell table:formula="of:=IFERROR(VLOOKUP([.$V302];[$遺業能力番号.$A$1:$遺業能力番号.$B$9];2;0);0)" office:value-type="float" office:value="1" calcext:value-type="float">
            <text:p>1</text:p>
          </table:table-cell>
          <table:table-cell office:value-type="string" calcext:value-type="string">
            <text:p>https://one-draw.jp/ijinden/cardlist/003/card/03_073.png</text:p>
          </table:table-cell>
          <table:table-cell table:formula="of:=CONCATENATE([$JSON.$A$1];[.$C302];[$JSON.$B$1];[.$E302];[$JSON.$C$1];[.$F302];[$JSON.$D$1];IF(ISNA([.$S302]);&quot;null&quot;;&quot;&quot;&quot;&quot;&amp;[.$S302]&amp;&quot;&quot;&quot;&quot;);[$JSON.$E$1];[.$U302];[$JSON.$F$1];IF(ISNA([.$V302]);&quot;null&quot;;&quot;&quot;&quot;&quot;&amp;[.$V302]&amp;&quot;&quot;&quot;&quot;);[$JSON.$G$1];[.$X302];[$JSON.$H$1];[.$H302];[$JSON.$I$1];[.J302];[$JSON.$J$1];[.$L302];[$JSON.$K$1];[.$O302];[$JSON.$L$1];[.$N302];[$JSON.$M$1];[.$R302];[$JSON.$N$1];[.$T302];[$JSON.$O$1];[.$W302];[$JSON.$P$1];[.$A302];[$JSON.$Q$1];[.$B302];[$JSON.$R$1])" office:value-type="string" office:string-value="{&quot;id&quot;:&quot;3-73&quot;,&quot;name&quot;:&quot;怒りの種&quot;,&quot;kana&quot;:&quot;いかりのたね&quot;,&quot;traitText&quot;:null,&quot;ruleText&quot;:&quot;魔力ゾーンに置かれたとき、自分の山札の上から1枚を裏のまま魔力ゾーンに置く。&quot;,&quot;legacyText&quot;:&quot;魔力化&quot;,&quot;imageUrl&quot;:&quot;https://one-draw.jp/ijinden/cardlist/003/card/03_073.png&quot;,&quot;expansion&quot;:35,&quot;rarity&quot;:1,&quot;type&quot;:4,&quot;level&quot;:1,&quot;color&quot;:4,&quot;term&quot;:0,&quot;trait&quot;:0,&quot;legacy&quot;:1,&quot;orderTable&quot;:301,&quot;orderDeck&quot;:359}," calcext:value-type="string">
            <text:p>{"id":"3-73","name":"怒りの種","kana":"いかりのたね","traitText":null,"ruleText":"魔力ゾーンに置かれたとき、自分の山札の上から1枚を裏のまま魔力ゾーンに置く。","legacyText":"魔力化","imageUrl":"https://one-draw.jp/ijinden/cardlist/003/card/03_073.png","expansion":35,"rarity":1,"type":4,"level":1,"color":4,"term":0,"trait":0,"legacy":1,"orderTable":301,"orderDeck":359},</text:p>
          </table:table-cell>
          <table:table-cell table:number-columns-repeated="16347"/>
        </table:table-row>
        <table:table-row table:style-name="ro2">
          <table:table-cell office:value-type="float" office:value="302" calcext:value-type="float">
            <text:p>302</text:p>
          </table:table-cell>
          <table:table-cell office:value-type="float" office:value="364" calcext:value-type="float">
            <text:p>364</text:p>
          </table:table-cell>
          <table:table-cell office:value-type="string" calcext:value-type="string">
            <text:p>3-74</text:p>
          </table:table-cell>
          <table:table-cell office:value-type="float" office:value="74" calcext:value-type="float">
            <text:p>74</text:p>
          </table:table-cell>
          <table:table-cell office:value-type="string" calcext:value-type="string">
            <text:p>苦しみの種</text:p>
          </table:table-cell>
          <table:table-cell office:value-type="string" calcext:value-type="string">
            <text:p>くるしみのたね</text:p>
          </table:table-cell>
          <table:table-cell office:value-type="string" calcext:value-type="string">
            <text:p>第３弾ブースターパック</text:p>
          </table:table-cell>
          <table:table-cell table:formula="of:=VLOOKUP([.G303];[$収録番号.$A$1:$収録番号.$B$9];2;0)" office:value-type="float" office:value="35" calcext:value-type="float">
            <text:p>35</text:p>
          </table:table-cell>
          <table:table-cell office:value-type="string" calcext:value-type="string">
            <text:p>N</text:p>
          </table:table-cell>
          <table:table-cell table:formula="of:=VLOOKUP([.I303];[$レアリティ番号.$A$1:$レアリティ番号.$B$4];2;0)" office:value-type="float" office:value="1" calcext:value-type="float">
            <text:p>1</text:p>
          </table:table-cell>
          <table:table-cell office:value-type="string" calcext:value-type="string">
            <text:p>マリョク</text:p>
          </table:table-cell>
          <table:table-cell table:formula="of:=VLOOKUP([.K303];[$種類番号.$A$1:$種類番号.$B$4];2;0)" office:value-type="float" office:value="4" calcext:value-type="float">
            <text:p>4</text:p>
          </table:table-cell>
          <table:table-cell office:value-type="string" calcext:value-type="string">
            <text:p>黄</text:p>
          </table:table-cell>
          <table:table-cell table:formula="of:=VLOOKUP([.M303];[$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0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03];[$特性番号.$A$1:$特性番号.$B$8];2;0);0)" office:value-type="float" office:value="0" calcext:value-type="float">
            <text:p>0</text:p>
          </table:table-cell>
          <table:table-cell office:value-type="string" calcext:value-type="string">
            <text:p>魔力ゾーンに置かれたとき、自分の山札の上から1枚を裏のまま魔力ゾーンに置く。</text:p>
          </table:table-cell>
          <table:table-cell table:style-name="ce8" office:value-type="string" calcext:value-type="string">
            <text:p>魔力化</text:p>
          </table:table-cell>
          <table:table-cell table:formula="of:=IFERROR(VLOOKUP([.$V303];[$遺業能力番号.$A$1:$遺業能力番号.$B$9];2;0);0)" office:value-type="float" office:value="1" calcext:value-type="float">
            <text:p>1</text:p>
          </table:table-cell>
          <table:table-cell office:value-type="string" calcext:value-type="string">
            <text:p>https://one-draw.jp/ijinden/cardlist/003/card/03_074.png</text:p>
          </table:table-cell>
          <table:table-cell table:formula="of:=CONCATENATE([$JSON.$A$1];[.$C303];[$JSON.$B$1];[.$E303];[$JSON.$C$1];[.$F303];[$JSON.$D$1];IF(ISNA([.$S303]);&quot;null&quot;;&quot;&quot;&quot;&quot;&amp;[.$S303]&amp;&quot;&quot;&quot;&quot;);[$JSON.$E$1];[.$U303];[$JSON.$F$1];IF(ISNA([.$V303]);&quot;null&quot;;&quot;&quot;&quot;&quot;&amp;[.$V303]&amp;&quot;&quot;&quot;&quot;);[$JSON.$G$1];[.$X303];[$JSON.$H$1];[.$H303];[$JSON.$I$1];[.J303];[$JSON.$J$1];[.$L303];[$JSON.$K$1];[.$O303];[$JSON.$L$1];[.$N303];[$JSON.$M$1];[.$R303];[$JSON.$N$1];[.$T303];[$JSON.$O$1];[.$W303];[$JSON.$P$1];[.$A303];[$JSON.$Q$1];[.$B303];[$JSON.$R$1])" office:value-type="string" office:string-value="{&quot;id&quot;:&quot;3-74&quot;,&quot;name&quot;:&quot;苦しみの種&quot;,&quot;kana&quot;:&quot;くるしみのたね&quot;,&quot;traitText&quot;:null,&quot;ruleText&quot;:&quot;魔力ゾーンに置かれたとき、自分の山札の上から1枚を裏のまま魔力ゾーンに置く。&quot;,&quot;legacyText&quot;:&quot;魔力化&quot;,&quot;imageUrl&quot;:&quot;https://one-draw.jp/ijinden/cardlist/003/card/03_074.png&quot;,&quot;expansion&quot;:35,&quot;rarity&quot;:1,&quot;type&quot;:4,&quot;level&quot;:1,&quot;color&quot;:8,&quot;term&quot;:0,&quot;trait&quot;:0,&quot;legacy&quot;:1,&quot;orderTable&quot;:302,&quot;orderDeck&quot;:364}," calcext:value-type="string">
            <text:p>{"id":"3-74","name":"苦しみの種","kana":"くるしみのたね","traitText":null,"ruleText":"魔力ゾーンに置かれたとき、自分の山札の上から1枚を裏のまま魔力ゾーンに置く。","legacyText":"魔力化","imageUrl":"https://one-draw.jp/ijinden/cardlist/003/card/03_074.png","expansion":35,"rarity":1,"type":4,"level":1,"color":8,"term":0,"trait":0,"legacy":1,"orderTable":302,"orderDeck":364},</text:p>
          </table:table-cell>
          <table:table-cell table:number-columns-repeated="16347"/>
        </table:table-row>
        <table:table-row table:style-name="ro2">
          <table:table-cell office:value-type="float" office:value="303" calcext:value-type="float">
            <text:p>303</text:p>
          </table:table-cell>
          <table:table-cell office:value-type="float" office:value="369" calcext:value-type="float">
            <text:p>369</text:p>
          </table:table-cell>
          <table:table-cell office:value-type="string" calcext:value-type="string">
            <text:p>3-75</text:p>
          </table:table-cell>
          <table:table-cell office:value-type="float" office:value="75" calcext:value-type="float">
            <text:p>75</text:p>
          </table:table-cell>
          <table:table-cell office:value-type="string" calcext:value-type="string">
            <text:p>悲しみの種</text:p>
          </table:table-cell>
          <table:table-cell office:value-type="string" calcext:value-type="string">
            <text:p>かなしみのたね</text:p>
          </table:table-cell>
          <table:table-cell office:value-type="string" calcext:value-type="string">
            <text:p>第３弾ブースターパック</text:p>
          </table:table-cell>
          <table:table-cell table:formula="of:=VLOOKUP([.G304];[$収録番号.$A$1:$収録番号.$B$9];2;0)" office:value-type="float" office:value="35" calcext:value-type="float">
            <text:p>35</text:p>
          </table:table-cell>
          <table:table-cell office:value-type="string" calcext:value-type="string">
            <text:p>N</text:p>
          </table:table-cell>
          <table:table-cell table:formula="of:=VLOOKUP([.I304];[$レアリティ番号.$A$1:$レアリティ番号.$B$4];2;0)" office:value-type="float" office:value="1" calcext:value-type="float">
            <text:p>1</text:p>
          </table:table-cell>
          <table:table-cell office:value-type="string" calcext:value-type="string">
            <text:p>マリョク</text:p>
          </table:table-cell>
          <table:table-cell table:formula="of:=VLOOKUP([.K304];[$種類番号.$A$1:$種類番号.$B$4];2;0)" office:value-type="float" office:value="4" calcext:value-type="float">
            <text:p>4</text:p>
          </table:table-cell>
          <table:table-cell office:value-type="string" calcext:value-type="string">
            <text:p>紫</text:p>
          </table:table-cell>
          <table:table-cell table:formula="of:=VLOOKUP([.M304];[$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0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04];[$特性番号.$A$1:$特性番号.$B$8];2;0);0)" office:value-type="float" office:value="0" calcext:value-type="float">
            <text:p>0</text:p>
          </table:table-cell>
          <table:table-cell office:value-type="string" calcext:value-type="string">
            <text:p>魔力ゾーンに置かれたとき、自分の山札の上から1枚を裏のまま魔力ゾーンに置く。</text:p>
          </table:table-cell>
          <table:table-cell table:style-name="ce8" office:value-type="string" calcext:value-type="string">
            <text:p>魔力化</text:p>
          </table:table-cell>
          <table:table-cell table:formula="of:=IFERROR(VLOOKUP([.$V304];[$遺業能力番号.$A$1:$遺業能力番号.$B$9];2;0);0)" office:value-type="float" office:value="1" calcext:value-type="float">
            <text:p>1</text:p>
          </table:table-cell>
          <table:table-cell office:value-type="string" calcext:value-type="string">
            <text:p>https://one-draw.jp/ijinden/cardlist/003/card/03_075.png</text:p>
          </table:table-cell>
          <table:table-cell table:formula="of:=CONCATENATE([$JSON.$A$1];[.$C304];[$JSON.$B$1];[.$E304];[$JSON.$C$1];[.$F304];[$JSON.$D$1];IF(ISNA([.$S304]);&quot;null&quot;;&quot;&quot;&quot;&quot;&amp;[.$S304]&amp;&quot;&quot;&quot;&quot;);[$JSON.$E$1];[.$U304];[$JSON.$F$1];IF(ISNA([.$V304]);&quot;null&quot;;&quot;&quot;&quot;&quot;&amp;[.$V304]&amp;&quot;&quot;&quot;&quot;);[$JSON.$G$1];[.$X304];[$JSON.$H$1];[.$H304];[$JSON.$I$1];[.J304];[$JSON.$J$1];[.$L304];[$JSON.$K$1];[.$O304];[$JSON.$L$1];[.$N304];[$JSON.$M$1];[.$R304];[$JSON.$N$1];[.$T304];[$JSON.$O$1];[.$W304];[$JSON.$P$1];[.$A304];[$JSON.$Q$1];[.$B304];[$JSON.$R$1])" office:value-type="string" office:string-value="{&quot;id&quot;:&quot;3-75&quot;,&quot;name&quot;:&quot;悲しみの種&quot;,&quot;kana&quot;:&quot;かなしみのたね&quot;,&quot;traitText&quot;:null,&quot;ruleText&quot;:&quot;魔力ゾーンに置かれたとき、自分の山札の上から1枚を裏のまま魔力ゾーンに置く。&quot;,&quot;legacyText&quot;:&quot;魔力化&quot;,&quot;imageUrl&quot;:&quot;https://one-draw.jp/ijinden/cardlist/003/card/03_075.png&quot;,&quot;expansion&quot;:35,&quot;rarity&quot;:1,&quot;type&quot;:4,&quot;level&quot;:1,&quot;color&quot;:16,&quot;term&quot;:0,&quot;trait&quot;:0,&quot;legacy&quot;:1,&quot;orderTable&quot;:303,&quot;orderDeck&quot;:369}," calcext:value-type="string">
            <text:p>{"id":"3-75","name":"悲しみの種","kana":"かなしみのたね","traitText":null,"ruleText":"魔力ゾーンに置かれたとき、自分の山札の上から1枚を裏のまま魔力ゾーンに置く。","legacyText":"魔力化","imageUrl":"https://one-draw.jp/ijinden/cardlist/003/card/03_075.png","expansion":35,"rarity":1,"type":4,"level":1,"color":16,"term":0,"trait":0,"legacy":1,"orderTable":303,"orderDeck":369},</text:p>
          </table:table-cell>
          <table:table-cell table:number-columns-repeated="16347"/>
        </table:table-row>
        <table:table-row table:style-name="ro2">
          <table:table-cell office:value-type="float" office:value="304" calcext:value-type="float">
            <text:p>304</text:p>
          </table:table-cell>
          <table:table-cell office:value-type="float" office:value="370" calcext:value-type="float">
            <text:p>370</text:p>
          </table:table-cell>
          <table:table-cell office:value-type="string" calcext:value-type="string">
            <text:p>3-76</text:p>
          </table:table-cell>
          <table:table-cell office:value-type="float" office:value="76" calcext:value-type="float">
            <text:p>76</text:p>
          </table:table-cell>
          <table:table-cell office:value-type="string" calcext:value-type="string">
            <text:p>ダンダラ羽織</text:p>
          </table:table-cell>
          <table:table-cell office:value-type="string" calcext:value-type="string">
            <text:p>だんだらばおり</text:p>
          </table:table-cell>
          <table:table-cell office:value-type="string" calcext:value-type="string">
            <text:p>第３弾ブースターパック</text:p>
          </table:table-cell>
          <table:table-cell table:formula="of:=VLOOKUP([.G305];[$収録番号.$A$1:$収録番号.$B$9];2;0)" office:value-type="float" office:value="35" calcext:value-type="float">
            <text:p>35</text:p>
          </table:table-cell>
          <table:table-cell office:value-type="string" calcext:value-type="string">
            <text:p>N</text:p>
          </table:table-cell>
          <table:table-cell table:formula="of:=VLOOKUP([.I305];[$レアリティ番号.$A$1:$レアリティ番号.$B$4];2;0)" office:value-type="float" office:value="1" calcext:value-type="float">
            <text:p>1</text:p>
          </table:table-cell>
          <table:table-cell office:value-type="string" calcext:value-type="string">
            <text:p>マリョク</text:p>
          </table:table-cell>
          <table:table-cell table:formula="of:=VLOOKUP([.K305];[$種類番号.$A$1:$種類番号.$B$4];2;0)" office:value-type="float" office:value="4" calcext:value-type="float">
            <text:p>4</text:p>
          </table:table-cell>
          <table:table-cell office:value-type="string" calcext:value-type="string">
            <text:p>紫</text:p>
          </table:table-cell>
          <table:table-cell table:formula="of:=VLOOKUP([.M305];[$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0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05];[$特性番号.$A$1:$特性番号.$B$8];2;0);0)" office:value-type="float" office:value="0" calcext:value-type="float">
            <text:p>0</text:p>
          </table:table-cell>
          <table:table-cell office:value-type="string" calcext:value-type="string">
            <text:p>イジン召喚によってイジンが自分の戦場に置かれる際、そのイジンに装備させてもよい。¶装備 : 「特性：志願」 ガーディアンが自分の戦場にいない間「即応 ダブルプレッシャー」を得る。</text:p>
          </table:table-cell>
          <table:table-cell table:style-name="ce8" office:value-type="string" calcext:value-type="string">
            <text:p>復元</text:p>
          </table:table-cell>
          <table:table-cell table:formula="of:=IFERROR(VLOOKUP([.$V305];[$遺業能力番号.$A$1:$遺業能力番号.$B$9];2;0);0)" office:value-type="float" office:value="3" calcext:value-type="float">
            <text:p>3</text:p>
          </table:table-cell>
          <table:table-cell office:value-type="string" calcext:value-type="string">
            <text:p>https://one-draw.jp/ijinden/cardlist/003/card/03_076.png</text:p>
          </table:table-cell>
          <table:table-cell table:formula="of:=CONCATENATE([$JSON.$A$1];[.$C305];[$JSON.$B$1];[.$E305];[$JSON.$C$1];[.$F305];[$JSON.$D$1];IF(ISNA([.$S305]);&quot;null&quot;;&quot;&quot;&quot;&quot;&amp;[.$S305]&amp;&quot;&quot;&quot;&quot;);[$JSON.$E$1];[.$U305];[$JSON.$F$1];IF(ISNA([.$V305]);&quot;null&quot;;&quot;&quot;&quot;&quot;&amp;[.$V305]&amp;&quot;&quot;&quot;&quot;);[$JSON.$G$1];[.$X305];[$JSON.$H$1];[.$H305];[$JSON.$I$1];[.J305];[$JSON.$J$1];[.$L305];[$JSON.$K$1];[.$O305];[$JSON.$L$1];[.$N305];[$JSON.$M$1];[.$R305];[$JSON.$N$1];[.$T305];[$JSON.$O$1];[.$W305];[$JSON.$P$1];[.$A305];[$JSON.$Q$1];[.$B305];[$JSON.$R$1])" office:value-type="string" office:string-value="{&quot;id&quot;:&quot;3-76&quot;,&quot;name&quot;:&quot;ダンダラ羽織&quot;,&quot;kana&quot;:&quot;だんだらばおり&quot;,&quot;traitText&quot;:null,&quot;ruleText&quot;:&quot;イジン召喚によってイジンが自分の戦場に置かれる際、そのイジンに装備させてもよい。¶装備 : 「特性：志願」 ガーディアンが自分の戦場にいない間「即応 ダブルプレッシャー」を得る。&quot;,&quot;legacyText&quot;:&quot;復元&quot;,&quot;imageUrl&quot;:&quot;https://one-draw.jp/ijinden/cardlist/003/card/03_076.png&quot;,&quot;expansion&quot;:35,&quot;rarity&quot;:1,&quot;type&quot;:4,&quot;level&quot;:1,&quot;color&quot;:16,&quot;term&quot;:0,&quot;trait&quot;:0,&quot;legacy&quot;:3,&quot;orderTable&quot;:304,&quot;orderDeck&quot;:370}," calcext:value-type="string">
            <text:p>{"id":"3-76","name":"ダンダラ羽織","kana":"だんだらばおり","traitText":null,"ruleText":"イジン召喚によってイジンが自分の戦場に置かれる際、そのイジンに装備させてもよい。¶装備 : 「特性：志願」 ガーディアンが自分の戦場にいない間「即応 ダブルプレッシャー」を得る。","legacyText":"復元","imageUrl":"https://one-draw.jp/ijinden/cardlist/003/card/03_076.png","expansion":35,"rarity":1,"type":4,"level":1,"color":16,"term":0,"trait":0,"legacy":3,"orderTable":304,"orderDeck":370},</text:p>
          </table:table-cell>
          <table:table-cell table:number-columns-repeated="16347"/>
        </table:table-row>
        <table:table-row table:style-name="ro2">
          <table:table-cell office:value-type="float" office:value="305" calcext:value-type="float">
            <text:p>305</text:p>
          </table:table-cell>
          <table:table-cell office:value-type="float" office:value="342" calcext:value-type="float">
            <text:p>342</text:p>
          </table:table-cell>
          <table:table-cell office:value-type="string" calcext:value-type="string">
            <text:p>3-77</text:p>
          </table:table-cell>
          <table:table-cell office:value-type="float" office:value="77" calcext:value-type="float">
            <text:p>77</text:p>
          </table:table-cell>
          <table:table-cell office:value-type="string" calcext:value-type="string">
            <text:p>遁甲盤</text:p>
          </table:table-cell>
          <table:table-cell office:value-type="string" calcext:value-type="string">
            <text:p>とんこうばん</text:p>
          </table:table-cell>
          <table:table-cell office:value-type="string" calcext:value-type="string">
            <text:p>第３弾ブースターパック</text:p>
          </table:table-cell>
          <table:table-cell table:formula="of:=VLOOKUP([.G306];[$収録番号.$A$1:$収録番号.$B$9];2;0)" office:value-type="float" office:value="35" calcext:value-type="float">
            <text:p>35</text:p>
          </table:table-cell>
          <table:table-cell office:value-type="string" calcext:value-type="string">
            <text:p>N</text:p>
          </table:table-cell>
          <table:table-cell table:formula="of:=VLOOKUP([.I306];[$レアリティ番号.$A$1:$レアリティ番号.$B$4];2;0)" office:value-type="float" office:value="1" calcext:value-type="float">
            <text:p>1</text:p>
          </table:table-cell>
          <table:table-cell office:value-type="string" calcext:value-type="string">
            <text:p>マリョク</text:p>
          </table:table-cell>
          <table:table-cell table:formula="of:=VLOOKUP([.K306];[$種類番号.$A$1:$種類番号.$B$4];2;0)" office:value-type="float" office:value="4" calcext:value-type="float">
            <text:p>4</text:p>
          </table:table-cell>
          <table:table-cell office:value-type="string" calcext:value-type="string">
            <text:p>無色</text:p>
          </table:table-cell>
          <table:table-cell table:formula="of:=VLOOKUP([.M306];[$色番号.$A$1:$色番号.$B$10];2;0)" office:value-type="float" office:value="64" calcext:value-type="float">
            <text:p>64</text:p>
          </table:table-cell>
          <table:table-cell office:value-type="float" office:value="0" calcext:value-type="float">
            <text:p>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0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06];[$特性番号.$A$1:$特性番号.$B$8];2;0);0)" office:value-type="float" office:value="0" calcext:value-type="float">
            <text:p>0</text:p>
          </table:table-cell>
          <table:table-cell office:value-type="string" calcext:value-type="string">
            <text:p>相手のターンのブロックステップが開始したとき、これが魔力ゾーンに裏で置かれているなら、これを表にして、アタッカー1体を指定して発動できる。そのアタッカーをアタッカーでない状態にする。</text:p>
          </table:table-cell>
          <table:table-cell table:style-name="ce8" office:value-type="string" calcext:value-type="string">
            <text:p>手札に戻す</text:p>
          </table:table-cell>
          <table:table-cell table:formula="of:=IFERROR(VLOOKUP([.$V306];[$遺業能力番号.$A$1:$遺業能力番号.$B$9];2;0);0)" office:value-type="float" office:value="5" calcext:value-type="float">
            <text:p>5</text:p>
          </table:table-cell>
          <table:table-cell office:value-type="string" calcext:value-type="string">
            <text:p>https://one-draw.jp/ijinden/cardlist/003/card/03_077.png</text:p>
          </table:table-cell>
          <table:table-cell table:formula="of:=CONCATENATE([$JSON.$A$1];[.$C306];[$JSON.$B$1];[.$E306];[$JSON.$C$1];[.$F306];[$JSON.$D$1];IF(ISNA([.$S306]);&quot;null&quot;;&quot;&quot;&quot;&quot;&amp;[.$S306]&amp;&quot;&quot;&quot;&quot;);[$JSON.$E$1];[.$U306];[$JSON.$F$1];IF(ISNA([.$V306]);&quot;null&quot;;&quot;&quot;&quot;&quot;&amp;[.$V306]&amp;&quot;&quot;&quot;&quot;);[$JSON.$G$1];[.$X306];[$JSON.$H$1];[.$H306];[$JSON.$I$1];[.J306];[$JSON.$J$1];[.$L306];[$JSON.$K$1];[.$O306];[$JSON.$L$1];[.$N306];[$JSON.$M$1];[.$R306];[$JSON.$N$1];[.$T306];[$JSON.$O$1];[.$W306];[$JSON.$P$1];[.$A306];[$JSON.$Q$1];[.$B306];[$JSON.$R$1])" office:value-type="string" office:string-value="{&quot;id&quot;:&quot;3-77&quot;,&quot;name&quot;:&quot;遁甲盤&quot;,&quot;kana&quot;:&quot;とんこうばん&quot;,&quot;traitText&quot;:null,&quot;ruleText&quot;:&quot;相手のターンのブロックステップが開始したとき、これが魔力ゾーンに裏で置かれているなら、これを表にして、アタッカー1体を指定して発動できる。そのアタッカーをアタッカーでない状態にする。&quot;,&quot;legacyText&quot;:&quot;手札に戻す&quot;,&quot;imageUrl&quot;:&quot;https://one-draw.jp/ijinden/cardlist/003/card/03_077.png&quot;,&quot;expansion&quot;:35,&quot;rarity&quot;:1,&quot;type&quot;:4,&quot;level&quot;:0,&quot;color&quot;:64,&quot;term&quot;:0,&quot;trait&quot;:0,&quot;legacy&quot;:5,&quot;orderTable&quot;:305,&quot;orderDeck&quot;:342}," calcext:value-type="string">
            <text:p>{"id":"3-77","name":"遁甲盤","kana":"とんこうばん","traitText":null,"ruleText":"相手のターンのブロックステップが開始したとき、これが魔力ゾーンに裏で置かれているなら、これを表にして、アタッカー1体を指定して発動できる。そのアタッカーをアタッカーでない状態にする。","legacyText":"手札に戻す","imageUrl":"https://one-draw.jp/ijinden/cardlist/003/card/03_077.png","expansion":35,"rarity":1,"type":4,"level":0,"color":64,"term":0,"trait":0,"legacy":5,"orderTable":305,"orderDeck":342},</text:p>
          </table:table-cell>
          <table:table-cell table:number-columns-repeated="16347"/>
        </table:table-row>
        <table:table-row table:style-name="ro2">
          <table:table-cell office:value-type="float" office:value="306" calcext:value-type="float">
            <text:p>306</text:p>
          </table:table-cell>
          <table:table-cell office:value-type="float" office:value="375" calcext:value-type="float">
            <text:p>375</text:p>
          </table:table-cell>
          <table:table-cell office:value-type="string" calcext:value-type="string">
            <text:p>3-78</text:p>
          </table:table-cell>
          <table:table-cell office:value-type="float" office:value="78" calcext:value-type="float">
            <text:p>78</text:p>
          </table:table-cell>
          <table:table-cell office:value-type="string" calcext:value-type="string">
            <text:p>ホムンクルス</text:p>
          </table:table-cell>
          <table:table-cell office:value-type="string" calcext:value-type="string">
            <text:p>ほむんくるす</text:p>
          </table:table-cell>
          <table:table-cell office:value-type="string" calcext:value-type="string">
            <text:p>第３弾ブースターパック</text:p>
          </table:table-cell>
          <table:table-cell table:formula="of:=VLOOKUP([.G307];[$収録番号.$A$1:$収録番号.$B$9];2;0)" office:value-type="float" office:value="35" calcext:value-type="float">
            <text:p>35</text:p>
          </table:table-cell>
          <table:table-cell office:value-type="string" calcext:value-type="string">
            <text:p>N</text:p>
          </table:table-cell>
          <table:table-cell table:formula="of:=VLOOKUP([.I307];[$レアリティ番号.$A$1:$レアリティ番号.$B$4];2;0)" office:value-type="float" office:value="1" calcext:value-type="float">
            <text:p>1</text:p>
          </table:table-cell>
          <table:table-cell office:value-type="string" calcext:value-type="string">
            <text:p>マリョク</text:p>
          </table:table-cell>
          <table:table-cell table:formula="of:=VLOOKUP([.K307];[$種類番号.$A$1:$種類番号.$B$4];2;0)" office:value-type="float" office:value="4" calcext:value-type="float">
            <text:p>4</text:p>
          </table:table-cell>
          <table:table-cell office:value-type="string" calcext:value-type="string">
            <text:p>無色</text:p>
          </table:table-cell>
          <table:table-cell table:formula="of:=VLOOKUP([.M307];[$色番号.$A$1:$色番号.$B$10];2;0)" office:value-type="float" office:value="64" calcext:value-type="float">
            <text:p>6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0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07];[$特性番号.$A$1:$特性番号.$B$8];2;0);0)" office:value-type="float" office:value="0" calcext:value-type="float">
            <text:p>0</text:p>
          </table:table-cell>
          <table:table-cell office:value-type="string" calcext:value-type="string">
            <text:p>自分のメインフェイズが開始したとき、自分の手札のレベル3以下のイジン1体を指定して発動できる。そのイジンを戦場に置いて、これを墓地に置く。¶冥装¶装備 : 「色 ： 赤 青 緑 黄 紫」</text:p>
          </table:table-cell>
          <table:table-cell table:style-name="ce8" table:formula="of:=NA()" office:value-type="string" office:string-value="" calcext:value-type="error">
            <text:p>#N/A</text:p>
          </table:table-cell>
          <table:table-cell table:formula="of:=IFERROR(VLOOKUP([.$V307];[$遺業能力番号.$A$1:$遺業能力番号.$B$9];2;0);0)" office:value-type="float" office:value="0" calcext:value-type="float">
            <text:p>0</text:p>
          </table:table-cell>
          <table:table-cell office:value-type="string" calcext:value-type="string">
            <text:p>https://one-draw.jp/ijinden/cardlist/003/card/03_078.png</text:p>
          </table:table-cell>
          <table:table-cell table:formula="of:=CONCATENATE([$JSON.$A$1];[.$C307];[$JSON.$B$1];[.$E307];[$JSON.$C$1];[.$F307];[$JSON.$D$1];IF(ISNA([.$S307]);&quot;null&quot;;&quot;&quot;&quot;&quot;&amp;[.$S307]&amp;&quot;&quot;&quot;&quot;);[$JSON.$E$1];[.$U307];[$JSON.$F$1];IF(ISNA([.$V307]);&quot;null&quot;;&quot;&quot;&quot;&quot;&amp;[.$V307]&amp;&quot;&quot;&quot;&quot;);[$JSON.$G$1];[.$X307];[$JSON.$H$1];[.$H307];[$JSON.$I$1];[.J307];[$JSON.$J$1];[.$L307];[$JSON.$K$1];[.$O307];[$JSON.$L$1];[.$N307];[$JSON.$M$1];[.$R307];[$JSON.$N$1];[.$T307];[$JSON.$O$1];[.$W307];[$JSON.$P$1];[.$A307];[$JSON.$Q$1];[.$B307];[$JSON.$R$1])" office:value-type="string" office:string-value="{&quot;id&quot;:&quot;3-78&quot;,&quot;name&quot;:&quot;ホムンクルス&quot;,&quot;kana&quot;:&quot;ほむんくるす&quot;,&quot;traitText&quot;:null,&quot;ruleText&quot;:&quot;自分のメインフェイズが開始したとき、自分の手札のレベル3以下のイジン1体を指定して発動できる。そのイジンを戦場に置いて、これを墓地に置く。¶冥装¶装備 : 「色 ： 赤 青 緑 黄 紫」&quot;,&quot;legacyText&quot;:null,&quot;imageUrl&quot;:&quot;https://one-draw.jp/ijinden/cardlist/003/card/03_078.png&quot;,&quot;expansion&quot;:35,&quot;rarity&quot;:1,&quot;type&quot;:4,&quot;level&quot;:1,&quot;color&quot;:64,&quot;term&quot;:0,&quot;trait&quot;:0,&quot;legacy&quot;:0,&quot;orderTable&quot;:306,&quot;orderDeck&quot;:375}," calcext:value-type="string">
            <text:p>{"id":"3-78","name":"ホムンクルス","kana":"ほむんくるす","traitText":null,"ruleText":"自分のメインフェイズが開始したとき、自分の手札のレベル3以下のイジン1体を指定して発動できる。そのイジンを戦場に置いて、これを墓地に置く。¶冥装¶装備 : 「色 ： 赤 青 緑 黄 紫」","legacyText":null,"imageUrl":"https://one-draw.jp/ijinden/cardlist/003/card/03_078.png","expansion":35,"rarity":1,"type":4,"level":1,"color":64,"term":0,"trait":0,"legacy":0,"orderTable":306,"orderDeck":375},</text:p>
          </table:table-cell>
          <table:table-cell table:number-columns-repeated="16347"/>
        </table:table-row>
        <table:table-row table:style-name="ro2">
          <table:table-cell office:value-type="float" office:value="307" calcext:value-type="float">
            <text:p>307</text:p>
          </table:table-cell>
          <table:table-cell office:value-type="float" office:value="376" calcext:value-type="float">
            <text:p>376</text:p>
          </table:table-cell>
          <table:table-cell office:value-type="string" calcext:value-type="string">
            <text:p>3-79</text:p>
          </table:table-cell>
          <table:table-cell office:value-type="float" office:value="79" calcext:value-type="float">
            <text:p>79</text:p>
          </table:table-cell>
          <table:table-cell office:value-type="string" calcext:value-type="string">
            <text:p>ストーンマスク</text:p>
          </table:table-cell>
          <table:table-cell office:value-type="string" calcext:value-type="string">
            <text:p>すとーんますく</text:p>
          </table:table-cell>
          <table:table-cell office:value-type="string" calcext:value-type="string">
            <text:p>第３弾ブースターパック</text:p>
          </table:table-cell>
          <table:table-cell table:formula="of:=VLOOKUP([.G308];[$収録番号.$A$1:$収録番号.$B$9];2;0)" office:value-type="float" office:value="35" calcext:value-type="float">
            <text:p>35</text:p>
          </table:table-cell>
          <table:table-cell office:value-type="string" calcext:value-type="string">
            <text:p>N</text:p>
          </table:table-cell>
          <table:table-cell table:formula="of:=VLOOKUP([.I308];[$レアリティ番号.$A$1:$レアリティ番号.$B$4];2;0)" office:value-type="float" office:value="1" calcext:value-type="float">
            <text:p>1</text:p>
          </table:table-cell>
          <table:table-cell office:value-type="string" calcext:value-type="string">
            <text:p>マリョク</text:p>
          </table:table-cell>
          <table:table-cell table:formula="of:=VLOOKUP([.K308];[$種類番号.$A$1:$種類番号.$B$4];2;0)" office:value-type="float" office:value="4" calcext:value-type="float">
            <text:p>4</text:p>
          </table:table-cell>
          <table:table-cell office:value-type="string" calcext:value-type="string">
            <text:p>無色</text:p>
          </table:table-cell>
          <table:table-cell table:formula="of:=VLOOKUP([.M308];[$色番号.$A$1:$色番号.$B$10];2;0)" office:value-type="float" office:value="64" calcext:value-type="float">
            <text:p>6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0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08];[$特性番号.$A$1:$特性番号.$B$8];2;0);0)" office:value-type="float" office:value="0" calcext:value-type="float">
            <text:p>0</text:p>
          </table:table-cell>
          <table:table-cell office:value-type="string" calcext:value-type="string">
            <text:p>イジン召喚によってイジンが自分の戦場に置かれる際、そのイジンに装備させてもよい。¶装備 : 戦場に置かれたとき、1ドローする。</text:p>
          </table:table-cell>
          <table:table-cell table:style-name="ce8" office:value-type="string" calcext:value-type="string">
            <text:p>復元</text:p>
          </table:table-cell>
          <table:table-cell table:formula="of:=IFERROR(VLOOKUP([.$V308];[$遺業能力番号.$A$1:$遺業能力番号.$B$9];2;0);0)" office:value-type="float" office:value="3" calcext:value-type="float">
            <text:p>3</text:p>
          </table:table-cell>
          <table:table-cell office:value-type="string" calcext:value-type="string">
            <text:p>https://one-draw.jp/ijinden/cardlist/003/card/03_079.png</text:p>
          </table:table-cell>
          <table:table-cell table:formula="of:=CONCATENATE([$JSON.$A$1];[.$C308];[$JSON.$B$1];[.$E308];[$JSON.$C$1];[.$F308];[$JSON.$D$1];IF(ISNA([.$S308]);&quot;null&quot;;&quot;&quot;&quot;&quot;&amp;[.$S308]&amp;&quot;&quot;&quot;&quot;);[$JSON.$E$1];[.$U308];[$JSON.$F$1];IF(ISNA([.$V308]);&quot;null&quot;;&quot;&quot;&quot;&quot;&amp;[.$V308]&amp;&quot;&quot;&quot;&quot;);[$JSON.$G$1];[.$X308];[$JSON.$H$1];[.$H308];[$JSON.$I$1];[.J308];[$JSON.$J$1];[.$L308];[$JSON.$K$1];[.$O308];[$JSON.$L$1];[.$N308];[$JSON.$M$1];[.$R308];[$JSON.$N$1];[.$T308];[$JSON.$O$1];[.$W308];[$JSON.$P$1];[.$A308];[$JSON.$Q$1];[.$B308];[$JSON.$R$1])" office:value-type="string" office:string-value="{&quot;id&quot;:&quot;3-79&quot;,&quot;name&quot;:&quot;ストーンマスク&quot;,&quot;kana&quot;:&quot;すとーんますく&quot;,&quot;traitText&quot;:null,&quot;ruleText&quot;:&quot;イジン召喚によってイジンが自分の戦場に置かれる際、そのイジンに装備させてもよい。¶装備 : 戦場に置かれたとき、1ドローする。&quot;,&quot;legacyText&quot;:&quot;復元&quot;,&quot;imageUrl&quot;:&quot;https://one-draw.jp/ijinden/cardlist/003/card/03_079.png&quot;,&quot;expansion&quot;:35,&quot;rarity&quot;:1,&quot;type&quot;:4,&quot;level&quot;:1,&quot;color&quot;:64,&quot;term&quot;:0,&quot;trait&quot;:0,&quot;legacy&quot;:3,&quot;orderTable&quot;:307,&quot;orderDeck&quot;:376}," calcext:value-type="string">
            <text:p>{"id":"3-79","name":"ストーンマスク","kana":"すとーんますく","traitText":null,"ruleText":"イジン召喚によってイジンが自分の戦場に置かれる際、そのイジンに装備させてもよい。¶装備 : 戦場に置かれたとき、1ドローする。","legacyText":"復元","imageUrl":"https://one-draw.jp/ijinden/cardlist/003/card/03_079.png","expansion":35,"rarity":1,"type":4,"level":1,"color":64,"term":0,"trait":0,"legacy":3,"orderTable":307,"orderDeck":376},</text:p>
          </table:table-cell>
          <table:table-cell table:number-columns-repeated="16347"/>
        </table:table-row>
        <table:table-row table:style-name="ro2">
          <table:table-cell office:value-type="float" office:value="308" calcext:value-type="float">
            <text:p>308</text:p>
          </table:table-cell>
          <table:table-cell office:value-type="float" office:value="390" calcext:value-type="float">
            <text:p>390</text:p>
          </table:table-cell>
          <table:table-cell office:value-type="string" calcext:value-type="string">
            <text:p>3-80</text:p>
          </table:table-cell>
          <table:table-cell office:value-type="float" office:value="80" calcext:value-type="float">
            <text:p>80</text:p>
          </table:table-cell>
          <table:table-cell office:value-type="string" calcext:value-type="string">
            <text:p>オブシディアン</text:p>
          </table:table-cell>
          <table:table-cell office:value-type="string" calcext:value-type="string">
            <text:p>おぶしでぃあん</text:p>
          </table:table-cell>
          <table:table-cell office:value-type="string" calcext:value-type="string">
            <text:p>第３弾ブースターパック</text:p>
          </table:table-cell>
          <table:table-cell table:formula="of:=VLOOKUP([.G309];[$収録番号.$A$1:$収録番号.$B$9];2;0)" office:value-type="float" office:value="35" calcext:value-type="float">
            <text:p>35</text:p>
          </table:table-cell>
          <table:table-cell office:value-type="string" calcext:value-type="string">
            <text:p>R</text:p>
          </table:table-cell>
          <table:table-cell table:formula="of:=VLOOKUP([.I309];[$レアリティ番号.$A$1:$レアリティ番号.$B$4];2;0)" office:value-type="float" office:value="2" calcext:value-type="float">
            <text:p>2</text:p>
          </table:table-cell>
          <table:table-cell office:value-type="string" calcext:value-type="string">
            <text:p>マリョク</text:p>
          </table:table-cell>
          <table:table-cell table:formula="of:=VLOOKUP([.K309];[$種類番号.$A$1:$種類番号.$B$4];2;0)" office:value-type="float" office:value="4" calcext:value-type="float">
            <text:p>4</text:p>
          </table:table-cell>
          <table:table-cell office:value-type="string" calcext:value-type="string">
            <text:p>無色</text:p>
          </table:table-cell>
          <table:table-cell table:formula="of:=VLOOKUP([.M309];[$色番号.$A$1:$色番号.$B$10];2;0)" office:value-type="float" office:value="64" calcext:value-type="float">
            <text:p>6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0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09];[$特性番号.$A$1:$特性番号.$B$8];2;0);0)" office:value-type="float" office:value="0" calcext:value-type="float">
            <text:p>0</text:p>
          </table:table-cell>
          <table:table-cell/>
          <table:table-cell table:style-name="ce8" office:value-type="string" calcext:value-type="string">
            <text:p>魔力化</text:p>
          </table:table-cell>
          <table:table-cell table:formula="of:=IFERROR(VLOOKUP([.$V309];[$遺業能力番号.$A$1:$遺業能力番号.$B$9];2;0);0)" office:value-type="float" office:value="1" calcext:value-type="float">
            <text:p>1</text:p>
          </table:table-cell>
          <table:table-cell office:value-type="string" calcext:value-type="string">
            <text:p>https://one-draw.jp/ijinden/cardlist/003/card/03_080.png</text:p>
          </table:table-cell>
          <table:table-cell table:formula="of:=CONCATENATE([$JSON.$A$1];[.$C309];[$JSON.$B$1];[.$E309];[$JSON.$C$1];[.$F309];[$JSON.$D$1];IF(ISNA([.$S309]);&quot;null&quot;;&quot;&quot;&quot;&quot;&amp;[.$S309]&amp;&quot;&quot;&quot;&quot;);[$JSON.$E$1];[.$U309];[$JSON.$F$1];IF(ISNA([.$V309]);&quot;null&quot;;&quot;&quot;&quot;&quot;&amp;[.$V309]&amp;&quot;&quot;&quot;&quot;);[$JSON.$G$1];[.$X309];[$JSON.$H$1];[.$H309];[$JSON.$I$1];[.J309];[$JSON.$J$1];[.$L309];[$JSON.$K$1];[.$O309];[$JSON.$L$1];[.$N309];[$JSON.$M$1];[.$R309];[$JSON.$N$1];[.$T309];[$JSON.$O$1];[.$W309];[$JSON.$P$1];[.$A309];[$JSON.$Q$1];[.$B309];[$JSON.$R$1])" office:value-type="string" office:string-value="{&quot;id&quot;:&quot;3-80&quot;,&quot;name&quot;:&quot;オブシディアン&quot;,&quot;kana&quot;:&quot;おぶしでぃあん&quot;,&quot;traitText&quot;:null,&quot;ruleText&quot;:&quot;&quot;,&quot;legacyText&quot;:&quot;魔力化&quot;,&quot;imageUrl&quot;:&quot;https://one-draw.jp/ijinden/cardlist/003/card/03_080.png&quot;,&quot;expansion&quot;:35,&quot;rarity&quot;:2,&quot;type&quot;:4,&quot;level&quot;:3,&quot;color&quot;:64,&quot;term&quot;:0,&quot;trait&quot;:0,&quot;legacy&quot;:1,&quot;orderTable&quot;:308,&quot;orderDeck&quot;:390}," calcext:value-type="string">
            <text:p>{"id":"3-80","name":"オブシディアン","kana":"おぶしでぃあん","traitText":null,"ruleText":"","legacyText":"魔力化","imageUrl":"https://one-draw.jp/ijinden/cardlist/003/card/03_080.png","expansion":35,"rarity":2,"type":4,"level":3,"color":64,"term":0,"trait":0,"legacy":1,"orderTable":308,"orderDeck":390},</text:p>
          </table:table-cell>
          <table:table-cell table:number-columns-repeated="16347"/>
        </table:table-row>
        <table:table-row table:style-name="ro2">
          <table:table-cell office:value-type="float" office:value="310" calcext:value-type="float">
            <text:p>310</text:p>
          </table:table-cell>
          <table:table-cell office:value-type="float" office:value="184" calcext:value-type="float">
            <text:p>184</text:p>
          </table:table-cell>
          <table:table-cell office:value-type="string" calcext:value-type="string">
            <text:p>4-01</text:p>
          </table:table-cell>
          <table:table-cell office:value-type="float" office:value="1" calcext:value-type="float">
            <text:p>1</text:p>
          </table:table-cell>
          <table:table-cell office:value-type="string" calcext:value-type="string">
            <text:p>西郷隆盛</text:p>
          </table:table-cell>
          <table:table-cell office:value-type="string" calcext:value-type="string">
            <text:p>さいごうたかもり</text:p>
          </table:table-cell>
          <table:table-cell office:value-type="string" calcext:value-type="string">
            <text:p>第４弾ブースターパック</text:p>
          </table:table-cell>
          <table:table-cell table:formula="of:=VLOOKUP([.G310];[$収録番号.$A$1:$収録番号.$B$9];2;0)" office:value-type="float" office:value="45" calcext:value-type="float">
            <text:p>45</text:p>
          </table:table-cell>
          <table:table-cell office:value-type="string" calcext:value-type="string">
            <text:p>SR</text:p>
          </table:table-cell>
          <table:table-cell table:formula="of:=VLOOKUP([.I310];[$レアリティ番号.$A$1:$レアリティ番号.$B$4];2;0)" office:value-type="float" office:value="4" calcext:value-type="float">
            <text:p>4</text:p>
          </table:table-cell>
          <table:table-cell office:value-type="string" calcext:value-type="string">
            <text:p>イジン</text:p>
          </table:table-cell>
          <table:table-cell table:formula="of:=VLOOKUP([.K310];[$種類番号.$A$1:$種類番号.$B$4];2;0)" office:value-type="float" office:value="1" calcext:value-type="float">
            <text:p>1</text:p>
          </table:table-cell>
          <table:table-cell office:value-type="string" calcext:value-type="string">
            <text:p>赤</text:p>
          </table:table-cell>
          <table:table-cell table:formula="of:=VLOOKUP([.M310];[$色番号.$A$1:$色番号.$B$10];2;0)" office:value-type="float" office:value="1" calcext:value-type="float">
            <text:p>1</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1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10];[$特性番号.$A$1:$特性番号.$B$8];2;0);0)" office:value-type="float" office:value="0" calcext:value-type="float">
            <text:p>0</text:p>
          </table:table-cell>
          <table:table-cell office:value-type="string" calcext:value-type="string">
            <text:p>モータル¶イジンが相手の戦場にいる間「アタック+3000」を得る。</text:p>
          </table:table-cell>
          <table:table-cell table:style-name="ce8" table:formula="of:=NA()" office:value-type="string" office:string-value="" calcext:value-type="error">
            <text:p>#N/A</text:p>
          </table:table-cell>
          <table:table-cell table:formula="of:=IFERROR(VLOOKUP([.$V310];[$遺業能力番号.$A$1:$遺業能力番号.$B$9];2;0);0)" office:value-type="float" office:value="0" calcext:value-type="float">
            <text:p>0</text:p>
          </table:table-cell>
          <table:table-cell office:value-type="string" calcext:value-type="string">
            <text:p>https://one-draw.jp/ijinden/cardlist/004/card/04_001.png</text:p>
          </table:table-cell>
          <table:table-cell table:formula="of:=CONCATENATE([$JSON.$A$1];[.$C310];[$JSON.$B$1];[.$E310];[$JSON.$C$1];[.$F310];[$JSON.$D$1];IF(ISNA([.$S310]);&quot;null&quot;;&quot;&quot;&quot;&quot;&amp;[.$S310]&amp;&quot;&quot;&quot;&quot;);[$JSON.$E$1];[.$U310];[$JSON.$F$1];IF(ISNA([.$V310]);&quot;null&quot;;&quot;&quot;&quot;&quot;&amp;[.$V310]&amp;&quot;&quot;&quot;&quot;);[$JSON.$G$1];[.$X310];[$JSON.$H$1];[.$H310];[$JSON.$I$1];[.J310];[$JSON.$J$1];[.$L310];[$JSON.$K$1];[.$O310];[$JSON.$L$1];[.$N310];[$JSON.$M$1];[.$R310];[$JSON.$N$1];[.$T310];[$JSON.$O$1];[.$W310];[$JSON.$P$1];[.$A310];[$JSON.$Q$1];[.$B310];[$JSON.$R$1])" office:value-type="string" office:string-value="{&quot;id&quot;:&quot;4-01&quot;,&quot;name&quot;:&quot;西郷隆盛&quot;,&quot;kana&quot;:&quot;さいごうたかもり&quot;,&quot;traitText&quot;:null,&quot;ruleText&quot;:&quot;モータル¶イジンが相手の戦場にいる間「アタック+3000」を得る。&quot;,&quot;legacyText&quot;:null,&quot;imageUrl&quot;:&quot;https://one-draw.jp/ijinden/cardlist/004/card/04_001.png&quot;,&quot;expansion&quot;:45,&quot;rarity&quot;:4,&quot;type&quot;:1,&quot;level&quot;:6,&quot;color&quot;:1,&quot;term&quot;:0,&quot;trait&quot;:0,&quot;legacy&quot;:0,&quot;orderTable&quot;:310,&quot;orderDeck&quot;:184}," calcext:value-type="string">
            <text:p>{"id":"4-01","name":"西郷隆盛","kana":"さいごうたかもり","traitText":null,"ruleText":"モータル¶イジンが相手の戦場にいる間「アタック+3000」を得る。","legacyText":null,"imageUrl":"https://one-draw.jp/ijinden/cardlist/004/card/04_001.png","expansion":45,"rarity":4,"type":1,"level":6,"color":1,"term":0,"trait":0,"legacy":0,"orderTable":310,"orderDeck":184},</text:p>
          </table:table-cell>
          <table:table-cell table:number-columns-repeated="16347"/>
        </table:table-row>
        <table:table-row table:style-name="ro2">
          <table:table-cell office:value-type="float" office:value="311" calcext:value-type="float">
            <text:p>311</text:p>
          </table:table-cell>
          <table:table-cell office:value-type="float" office:value="73" calcext:value-type="float">
            <text:p>73</text:p>
          </table:table-cell>
          <table:table-cell office:value-type="string" calcext:value-type="string">
            <text:p>4-02</text:p>
          </table:table-cell>
          <table:table-cell office:value-type="float" office:value="2" calcext:value-type="float">
            <text:p>2</text:p>
          </table:table-cell>
          <table:table-cell office:value-type="string" calcext:value-type="string">
            <text:p>リチャード・アークライト</text:p>
          </table:table-cell>
          <table:table-cell office:value-type="string" calcext:value-type="string">
            <text:p>りちゃーどあーくらいと</text:p>
          </table:table-cell>
          <table:table-cell office:value-type="string" calcext:value-type="string">
            <text:p>第４弾ブースターパック</text:p>
          </table:table-cell>
          <table:table-cell table:formula="of:=VLOOKUP([.G311];[$収録番号.$A$1:$収録番号.$B$9];2;0)" office:value-type="float" office:value="45" calcext:value-type="float">
            <text:p>45</text:p>
          </table:table-cell>
          <table:table-cell office:value-type="string" calcext:value-type="string">
            <text:p>SR</text:p>
          </table:table-cell>
          <table:table-cell table:formula="of:=VLOOKUP([.I311];[$レアリティ番号.$A$1:$レアリティ番号.$B$4];2;0)" office:value-type="float" office:value="4" calcext:value-type="float">
            <text:p>4</text:p>
          </table:table-cell>
          <table:table-cell office:value-type="string" calcext:value-type="string">
            <text:p>イジン</text:p>
          </table:table-cell>
          <table:table-cell table:formula="of:=VLOOKUP([.K311];[$種類番号.$A$1:$種類番号.$B$4];2;0)" office:value-type="float" office:value="1" calcext:value-type="float">
            <text:p>1</text:p>
          </table:table-cell>
          <table:table-cell office:value-type="string" calcext:value-type="string">
            <text:p>赤</text:p>
          </table:table-cell>
          <table:table-cell table:formula="of:=VLOOKUP([.M311];[$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1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11];[$特性番号.$A$1:$特性番号.$B$8];2;0);0)" office:value-type="float" office:value="0" calcext:value-type="float">
            <text:p>0</text:p>
          </table:table-cell>
          <table:table-cell office:value-type="string" calcext:value-type="string">
            <text:p>戦場に置かれたとき、魔力ゾーンのレベル2以上のマリョクすべてを裏にする。¶アタッカーになったとき、魔力ゾーンの裏のカード1つを指定して発動できる。そのカードを手札に戻す。</text:p>
          </table:table-cell>
          <table:table-cell table:style-name="ce8" office:value-type="string" calcext:value-type="string">
            <text:p>魔力化</text:p>
          </table:table-cell>
          <table:table-cell table:formula="of:=IFERROR(VLOOKUP([.$V311];[$遺業能力番号.$A$1:$遺業能力番号.$B$9];2;0);0)" office:value-type="float" office:value="1" calcext:value-type="float">
            <text:p>1</text:p>
          </table:table-cell>
          <table:table-cell office:value-type="string" calcext:value-type="string">
            <text:p>https://one-draw.jp/ijinden/cardlist/004/card/04_002.png</text:p>
          </table:table-cell>
          <table:table-cell table:formula="of:=CONCATENATE([$JSON.$A$1];[.$C311];[$JSON.$B$1];[.$E311];[$JSON.$C$1];[.$F311];[$JSON.$D$1];IF(ISNA([.$S311]);&quot;null&quot;;&quot;&quot;&quot;&quot;&amp;[.$S311]&amp;&quot;&quot;&quot;&quot;);[$JSON.$E$1];[.$U311];[$JSON.$F$1];IF(ISNA([.$V311]);&quot;null&quot;;&quot;&quot;&quot;&quot;&amp;[.$V311]&amp;&quot;&quot;&quot;&quot;);[$JSON.$G$1];[.$X311];[$JSON.$H$1];[.$H311];[$JSON.$I$1];[.J311];[$JSON.$J$1];[.$L311];[$JSON.$K$1];[.$O311];[$JSON.$L$1];[.$N311];[$JSON.$M$1];[.$R311];[$JSON.$N$1];[.$T311];[$JSON.$O$1];[.$W311];[$JSON.$P$1];[.$A311];[$JSON.$Q$1];[.$B311];[$JSON.$R$1])" office:value-type="string" office:string-value="{&quot;id&quot;:&quot;4-02&quot;,&quot;name&quot;:&quot;リチャード・アークライト&quot;,&quot;kana&quot;:&quot;りちゃーどあーくらいと&quot;,&quot;traitText&quot;:null,&quot;ruleText&quot;:&quot;戦場に置かれたとき、魔力ゾーンのレベル2以上のマリョクすべてを裏にする。¶アタッカーになったとき、魔力ゾーンの裏のカード1つを指定して発動できる。そのカードを手札に戻す。&quot;,&quot;legacyText&quot;:&quot;魔力化&quot;,&quot;imageUrl&quot;:&quot;https://one-draw.jp/ijinden/cardlist/004/card/04_002.png&quot;,&quot;expansion&quot;:45,&quot;rarity&quot;:4,&quot;type&quot;:1,&quot;level&quot;:3,&quot;color&quot;:1,&quot;term&quot;:0,&quot;trait&quot;:0,&quot;legacy&quot;:1,&quot;orderTable&quot;:311,&quot;orderDeck&quot;:73}," calcext:value-type="string">
            <text:p>{"id":"4-02","name":"リチャード・アークライト","kana":"りちゃーどあーくらいと","traitText":null,"ruleText":"戦場に置かれたとき、魔力ゾーンのレベル2以上のマリョクすべてを裏にする。¶アタッカーになったとき、魔力ゾーンの裏のカード1つを指定して発動できる。そのカードを手札に戻す。","legacyText":"魔力化","imageUrl":"https://one-draw.jp/ijinden/cardlist/004/card/04_002.png","expansion":45,"rarity":4,"type":1,"level":3,"color":1,"term":0,"trait":0,"legacy":1,"orderTable":311,"orderDeck":73},</text:p>
          </table:table-cell>
          <table:table-cell table:number-columns-repeated="16347"/>
        </table:table-row>
        <table:table-row table:style-name="ro2">
          <table:table-cell office:value-type="float" office:value="312" calcext:value-type="float">
            <text:p>312</text:p>
          </table:table-cell>
          <table:table-cell office:value-type="float" office:value="122" calcext:value-type="float">
            <text:p>122</text:p>
          </table:table-cell>
          <table:table-cell office:value-type="string" calcext:value-type="string">
            <text:p>4-03</text:p>
          </table:table-cell>
          <table:table-cell office:value-type="float" office:value="3" calcext:value-type="float">
            <text:p>3</text:p>
          </table:table-cell>
          <table:table-cell office:value-type="string" calcext:value-type="string">
            <text:p>アンナ・パブロワ</text:p>
          </table:table-cell>
          <table:table-cell office:value-type="string" calcext:value-type="string">
            <text:p>あんなぱぶろわ</text:p>
          </table:table-cell>
          <table:table-cell office:value-type="string" calcext:value-type="string">
            <text:p>第４弾ブースターパック</text:p>
          </table:table-cell>
          <table:table-cell table:formula="of:=VLOOKUP([.G312];[$収録番号.$A$1:$収録番号.$B$9];2;0)" office:value-type="float" office:value="45" calcext:value-type="float">
            <text:p>45</text:p>
          </table:table-cell>
          <table:table-cell office:value-type="string" calcext:value-type="string">
            <text:p>SR</text:p>
          </table:table-cell>
          <table:table-cell table:formula="of:=VLOOKUP([.I312];[$レアリティ番号.$A$1:$レアリティ番号.$B$4];2;0)" office:value-type="float" office:value="4" calcext:value-type="float">
            <text:p>4</text:p>
          </table:table-cell>
          <table:table-cell office:value-type="string" calcext:value-type="string">
            <text:p>イジン</text:p>
          </table:table-cell>
          <table:table-cell table:formula="of:=VLOOKUP([.K312];[$種類番号.$A$1:$種類番号.$B$4];2;0)" office:value-type="float" office:value="1" calcext:value-type="float">
            <text:p>1</text:p>
          </table:table-cell>
          <table:table-cell office:value-type="string" calcext:value-type="string">
            <text:p>青</text:p>
          </table:table-cell>
          <table:table-cell table:formula="of:=VLOOKUP([.M312];[$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1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12];[$特性番号.$A$1:$特性番号.$B$8];2;0);0)" office:value-type="float" office:value="0" calcext:value-type="float">
            <text:p>0</text:p>
          </table:table-cell>
          <table:table-cell office:value-type="string" calcext:value-type="string">
            <text:p>「音楽」イジンが自分の戦場にいる間「破壊されない」を得る。¶戦場のガーディアンが寝たときに発動できる。戦場の寝ているガーディアン1体につき、戦場のイジン1体を手札に戻す。</text:p>
          </table:table-cell>
          <table:table-cell table:style-name="ce8" office:value-type="string" calcext:value-type="string">
            <text:p>1ドローする</text:p>
          </table:table-cell>
          <table:table-cell table:formula="of:=IFERROR(VLOOKUP([.$V312];[$遺業能力番号.$A$1:$遺業能力番号.$B$9];2;0);0)" office:value-type="float" office:value="4" calcext:value-type="float">
            <text:p>4</text:p>
          </table:table-cell>
          <table:table-cell office:value-type="string" calcext:value-type="string">
            <text:p>https://one-draw.jp/ijinden/cardlist/004/card/04_003.png</text:p>
          </table:table-cell>
          <table:table-cell table:formula="of:=CONCATENATE([$JSON.$A$1];[.$C312];[$JSON.$B$1];[.$E312];[$JSON.$C$1];[.$F312];[$JSON.$D$1];IF(ISNA([.$S312]);&quot;null&quot;;&quot;&quot;&quot;&quot;&amp;[.$S312]&amp;&quot;&quot;&quot;&quot;);[$JSON.$E$1];[.$U312];[$JSON.$F$1];IF(ISNA([.$V312]);&quot;null&quot;;&quot;&quot;&quot;&quot;&amp;[.$V312]&amp;&quot;&quot;&quot;&quot;);[$JSON.$G$1];[.$X312];[$JSON.$H$1];[.$H312];[$JSON.$I$1];[.J312];[$JSON.$J$1];[.$L312];[$JSON.$K$1];[.$O312];[$JSON.$L$1];[.$N312];[$JSON.$M$1];[.$R312];[$JSON.$N$1];[.$T312];[$JSON.$O$1];[.$W312];[$JSON.$P$1];[.$A312];[$JSON.$Q$1];[.$B312];[$JSON.$R$1])" office:value-type="string" office:string-value="{&quot;id&quot;:&quot;4-03&quot;,&quot;name&quot;:&quot;アンナ・パブロワ&quot;,&quot;kana&quot;:&quot;あんなぱぶろわ&quot;,&quot;traitText&quot;:null,&quot;ruleText&quot;:&quot;「音楽」イジンが自分の戦場にいる間「破壊されない」を得る。¶戦場のガーディアンが寝たときに発動できる。戦場の寝ているガーディアン1体につき、戦場のイジン1体を手札に戻す。&quot;,&quot;legacyText&quot;:&quot;1ドローする&quot;,&quot;imageUrl&quot;:&quot;https://one-draw.jp/ijinden/cardlist/004/card/04_003.png&quot;,&quot;expansion&quot;:45,&quot;rarity&quot;:4,&quot;type&quot;:1,&quot;level&quot;:4,&quot;color&quot;:2,&quot;term&quot;:0,&quot;trait&quot;:0,&quot;legacy&quot;:4,&quot;orderTable&quot;:312,&quot;orderDeck&quot;:122}," calcext:value-type="string">
            <text:p>{"id":"4-03","name":"アンナ・パブロワ","kana":"あんなぱぶろわ","traitText":null,"ruleText":"「音楽」イジンが自分の戦場にいる間「破壊されない」を得る。¶戦場のガーディアンが寝たときに発動できる。戦場の寝ているガーディアン1体につき、戦場のイジン1体を手札に戻す。","legacyText":"1ドローする","imageUrl":"https://one-draw.jp/ijinden/cardlist/004/card/04_003.png","expansion":45,"rarity":4,"type":1,"level":4,"color":2,"term":0,"trait":0,"legacy":4,"orderTable":312,"orderDeck":122},</text:p>
          </table:table-cell>
          <table:table-cell table:number-columns-repeated="16347"/>
        </table:table-row>
        <table:table-row table:style-name="ro2">
          <table:table-cell office:value-type="float" office:value="313" calcext:value-type="float">
            <text:p>313</text:p>
          </table:table-cell>
          <table:table-cell office:value-type="float" office:value="207" calcext:value-type="float">
            <text:p>207</text:p>
          </table:table-cell>
          <table:table-cell office:value-type="string" calcext:value-type="string">
            <text:p>4-04</text:p>
          </table:table-cell>
          <table:table-cell office:value-type="float" office:value="4" calcext:value-type="float">
            <text:p>4</text:p>
          </table:table-cell>
          <table:table-cell office:value-type="string" calcext:value-type="string">
            <text:p>ルイ14世</text:p>
          </table:table-cell>
          <table:table-cell office:value-type="string" calcext:value-type="string">
            <text:p>るいじゅうよんせい</text:p>
          </table:table-cell>
          <table:table-cell office:value-type="string" calcext:value-type="string">
            <text:p>第４弾ブースターパック</text:p>
          </table:table-cell>
          <table:table-cell table:formula="of:=VLOOKUP([.G313];[$収録番号.$A$1:$収録番号.$B$9];2;0)" office:value-type="float" office:value="45" calcext:value-type="float">
            <text:p>45</text:p>
          </table:table-cell>
          <table:table-cell office:value-type="string" calcext:value-type="string">
            <text:p>SR</text:p>
          </table:table-cell>
          <table:table-cell table:formula="of:=VLOOKUP([.I313];[$レアリティ番号.$A$1:$レアリティ番号.$B$4];2;0)" office:value-type="float" office:value="4" calcext:value-type="float">
            <text:p>4</text:p>
          </table:table-cell>
          <table:table-cell office:value-type="string" calcext:value-type="string">
            <text:p>イジン</text:p>
          </table:table-cell>
          <table:table-cell table:formula="of:=VLOOKUP([.K313];[$種類番号.$A$1:$種類番号.$B$4];2;0)" office:value-type="float" office:value="1" calcext:value-type="float">
            <text:p>1</text:p>
          </table:table-cell>
          <table:table-cell office:value-type="string" calcext:value-type="string">
            <text:p>青</text:p>
          </table:table-cell>
          <table:table-cell table:formula="of:=VLOOKUP([.M313];[$色番号.$A$1:$色番号.$B$10];2;0)" office:value-type="float" office:value="2" calcext:value-type="float">
            <text:p>2</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1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13];[$特性番号.$A$1:$特性番号.$B$8];2;0);0)" office:value-type="float" office:value="0" calcext:value-type="float">
            <text:p>0</text:p>
          </table:table-cell>
          <table:table-cell office:value-type="string" calcext:value-type="string">
            <text:p>戦場に置かれたとき、自分の手札のカードすべてを墓地に置く。¶自分のエンドフェイズが開始したとき、自分の墓地のレベル5以下のイジン1体か、レベル6以下のハイケイ1つを指定して発動できる。そのイジンかハイケイを戦場に置く。¶自分のエンドフェイズが開始したとき、自分の墓地のカード1つを指定して発動できる。そのカードを裏向きで戦場に置く。</text:p>
          </table:table-cell>
          <table:table-cell table:style-name="ce8" table:formula="of:=NA()" office:value-type="string" office:string-value="" calcext:value-type="error">
            <text:p>#N/A</text:p>
          </table:table-cell>
          <table:table-cell table:formula="of:=IFERROR(VLOOKUP([.$V313];[$遺業能力番号.$A$1:$遺業能力番号.$B$9];2;0);0)" office:value-type="float" office:value="0" calcext:value-type="float">
            <text:p>0</text:p>
          </table:table-cell>
          <table:table-cell office:value-type="string" calcext:value-type="string">
            <text:p>https://one-draw.jp/ijinden/cardlist/004/card/04_004.png</text:p>
          </table:table-cell>
          <table:table-cell table:formula="of:=CONCATENATE([$JSON.$A$1];[.$C313];[$JSON.$B$1];[.$E313];[$JSON.$C$1];[.$F313];[$JSON.$D$1];IF(ISNA([.$S313]);&quot;null&quot;;&quot;&quot;&quot;&quot;&amp;[.$S313]&amp;&quot;&quot;&quot;&quot;);[$JSON.$E$1];[.$U313];[$JSON.$F$1];IF(ISNA([.$V313]);&quot;null&quot;;&quot;&quot;&quot;&quot;&amp;[.$V313]&amp;&quot;&quot;&quot;&quot;);[$JSON.$G$1];[.$X313];[$JSON.$H$1];[.$H313];[$JSON.$I$1];[.J313];[$JSON.$J$1];[.$L313];[$JSON.$K$1];[.$O313];[$JSON.$L$1];[.$N313];[$JSON.$M$1];[.$R313];[$JSON.$N$1];[.$T313];[$JSON.$O$1];[.$W313];[$JSON.$P$1];[.$A313];[$JSON.$Q$1];[.$B313];[$JSON.$R$1])" office:value-type="string" office:string-value="{&quot;id&quot;:&quot;4-04&quot;,&quot;name&quot;:&quot;ルイ14世&quot;,&quot;kana&quot;:&quot;るいじゅうよんせい&quot;,&quot;traitText&quot;:null,&quot;ruleText&quot;:&quot;戦場に置かれたとき、自分の手札のカードすべてを墓地に置く。¶自分のエンドフェイズが開始したとき、自分の墓地のレベル5以下のイジン1体か、レベル6以下のハイケイ1つを指定して発動できる。そのイジンかハイケイを戦場に置く。¶自分のエンドフェイズが開始したとき、自分の墓地のカード1つを指定して発動できる。そのカードを裏向きで戦場に置く。&quot;,&quot;legacyText&quot;:null,&quot;imageUrl&quot;:&quot;https://one-draw.jp/ijinden/cardlist/004/card/04_004.png&quot;,&quot;expansion&quot;:45,&quot;rarity&quot;:4,&quot;type&quot;:1,&quot;level&quot;:7,&quot;color&quot;:2,&quot;term&quot;:0,&quot;trait&quot;:0,&quot;legacy&quot;:0,&quot;orderTable&quot;:313,&quot;orderDeck&quot;:207}," calcext:value-type="string">
            <text:p>{"id":"4-04","name":"ルイ14世","kana":"るいじゅうよんせい","traitText":null,"ruleText":"戦場に置かれたとき、自分の手札のカードすべてを墓地に置く。¶自分のエンドフェイズが開始したとき、自分の墓地のレベル5以下のイジン1体か、レベル6以下のハイケイ1つを指定して発動できる。そのイジンかハイケイを戦場に置く。¶自分のエンドフェイズが開始したとき、自分の墓地のカード1つを指定して発動できる。そのカードを裏向きで戦場に置く。","legacyText":null,"imageUrl":"https://one-draw.jp/ijinden/cardlist/004/card/04_004.png","expansion":45,"rarity":4,"type":1,"level":7,"color":2,"term":0,"trait":0,"legacy":0,"orderTable":313,"orderDeck":207},</text:p>
          </table:table-cell>
          <table:table-cell table:number-columns-repeated="16347"/>
        </table:table-row>
        <table:table-row table:style-name="ro2">
          <table:table-cell office:value-type="float" office:value="314" calcext:value-type="float">
            <text:p>314</text:p>
          </table:table-cell>
          <table:table-cell office:value-type="float" office:value="50" calcext:value-type="float">
            <text:p>50</text:p>
          </table:table-cell>
          <table:table-cell office:value-type="string" calcext:value-type="string">
            <text:p>4-05</text:p>
          </table:table-cell>
          <table:table-cell office:value-type="float" office:value="5" calcext:value-type="float">
            <text:p>5</text:p>
          </table:table-cell>
          <table:table-cell office:value-type="string" calcext:value-type="string">
            <text:p>藤原不比等</text:p>
          </table:table-cell>
          <table:table-cell office:value-type="string" calcext:value-type="string">
            <text:p>ふじわらのふひと</text:p>
          </table:table-cell>
          <table:table-cell office:value-type="string" calcext:value-type="string">
            <text:p>第４弾ブースターパック</text:p>
          </table:table-cell>
          <table:table-cell table:formula="of:=VLOOKUP([.G314];[$収録番号.$A$1:$収録番号.$B$9];2;0)" office:value-type="float" office:value="45" calcext:value-type="float">
            <text:p>45</text:p>
          </table:table-cell>
          <table:table-cell office:value-type="string" calcext:value-type="string">
            <text:p>SR</text:p>
          </table:table-cell>
          <table:table-cell table:formula="of:=VLOOKUP([.I314];[$レアリティ番号.$A$1:$レアリティ番号.$B$4];2;0)" office:value-type="float" office:value="4" calcext:value-type="float">
            <text:p>4</text:p>
          </table:table-cell>
          <table:table-cell office:value-type="string" calcext:value-type="string">
            <text:p>イジン</text:p>
          </table:table-cell>
          <table:table-cell table:formula="of:=VLOOKUP([.K314];[$種類番号.$A$1:$種類番号.$B$4];2;0)" office:value-type="float" office:value="1" calcext:value-type="float">
            <text:p>1</text:p>
          </table:table-cell>
          <table:table-cell office:value-type="string" calcext:value-type="string">
            <text:p>緑</text:p>
          </table:table-cell>
          <table:table-cell table:formula="of:=VLOOKUP([.M314];[$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1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14];[$特性番号.$A$1:$特性番号.$B$8];2;0);0)" office:value-type="float" office:value="0" calcext:value-type="float">
            <text:p>0</text:p>
          </table:table-cell>
          <table:table-cell office:value-type="string" calcext:value-type="string">
            <text:p>能力によって、イジンが相手の戦場に置かれる際、そのイジンは寝ている状態で戦場に置かれる。¶相手の戦場のレベル5以下の寝ているイジンは、能力すべてを失う。この能力は、能力によって失われない。</text:p>
          </table:table-cell>
          <table:table-cell table:style-name="ce8" office:value-type="string" calcext:value-type="string">
            <text:p>反魂</text:p>
          </table:table-cell>
          <table:table-cell table:formula="of:=IFERROR(VLOOKUP([.$V314];[$遺業能力番号.$A$1:$遺業能力番号.$B$9];2;0);0)" office:value-type="float" office:value="6" calcext:value-type="float">
            <text:p>6</text:p>
          </table:table-cell>
          <table:table-cell office:value-type="string" calcext:value-type="string">
            <text:p>https://one-draw.jp/ijinden/cardlist/004/card/04_005.png</text:p>
          </table:table-cell>
          <table:table-cell table:formula="of:=CONCATENATE([$JSON.$A$1];[.$C314];[$JSON.$B$1];[.$E314];[$JSON.$C$1];[.$F314];[$JSON.$D$1];IF(ISNA([.$S314]);&quot;null&quot;;&quot;&quot;&quot;&quot;&amp;[.$S314]&amp;&quot;&quot;&quot;&quot;);[$JSON.$E$1];[.$U314];[$JSON.$F$1];IF(ISNA([.$V314]);&quot;null&quot;;&quot;&quot;&quot;&quot;&amp;[.$V314]&amp;&quot;&quot;&quot;&quot;);[$JSON.$G$1];[.$X314];[$JSON.$H$1];[.$H314];[$JSON.$I$1];[.J314];[$JSON.$J$1];[.$L314];[$JSON.$K$1];[.$O314];[$JSON.$L$1];[.$N314];[$JSON.$M$1];[.$R314];[$JSON.$N$1];[.$T314];[$JSON.$O$1];[.$W314];[$JSON.$P$1];[.$A314];[$JSON.$Q$1];[.$B314];[$JSON.$R$1])" office:value-type="string" office:string-value="{&quot;id&quot;:&quot;4-05&quot;,&quot;name&quot;:&quot;藤原不比等&quot;,&quot;kana&quot;:&quot;ふじわらのふひと&quot;,&quot;traitText&quot;:null,&quot;ruleText&quot;:&quot;能力によって、イジンが相手の戦場に置かれる際、そのイジンは寝ている状態で戦場に置かれる。¶相手の戦場のレベル5以下の寝ているイジンは、能力すべてを失う。この能力は、能力によって失われない。&quot;,&quot;legacyText&quot;:&quot;反魂&quot;,&quot;imageUrl&quot;:&quot;https://one-draw.jp/ijinden/cardlist/004/card/04_005.png&quot;,&quot;expansion&quot;:45,&quot;rarity&quot;:4,&quot;type&quot;:1,&quot;level&quot;:2,&quot;color&quot;:4,&quot;term&quot;:0,&quot;trait&quot;:0,&quot;legacy&quot;:6,&quot;orderTable&quot;:314,&quot;orderDeck&quot;:50}," calcext:value-type="string">
            <text:p>{"id":"4-05","name":"藤原不比等","kana":"ふじわらのふひと","traitText":null,"ruleText":"能力によって、イジンが相手の戦場に置かれる際、そのイジンは寝ている状態で戦場に置かれる。¶相手の戦場のレベル5以下の寝ているイジンは、能力すべてを失う。この能力は、能力によって失われない。","legacyText":"反魂","imageUrl":"https://one-draw.jp/ijinden/cardlist/004/card/04_005.png","expansion":45,"rarity":4,"type":1,"level":2,"color":4,"term":0,"trait":0,"legacy":6,"orderTable":314,"orderDeck":50},</text:p>
          </table:table-cell>
          <table:table-cell table:number-columns-repeated="16347"/>
        </table:table-row>
        <table:table-row table:style-name="ro2">
          <table:table-cell office:value-type="float" office:value="315" calcext:value-type="float">
            <text:p>315</text:p>
          </table:table-cell>
          <table:table-cell office:value-type="float" office:value="130" calcext:value-type="float">
            <text:p>130</text:p>
          </table:table-cell>
          <table:table-cell office:value-type="string" calcext:value-type="string">
            <text:p>4-06</text:p>
          </table:table-cell>
          <table:table-cell office:value-type="float" office:value="6" calcext:value-type="float">
            <text:p>6</text:p>
          </table:table-cell>
          <table:table-cell office:value-type="string" calcext:value-type="string">
            <text:p>伊能忠敬</text:p>
          </table:table-cell>
          <table:table-cell office:value-type="string" calcext:value-type="string">
            <text:p>いのうただたか</text:p>
          </table:table-cell>
          <table:table-cell office:value-type="string" calcext:value-type="string">
            <text:p>第４弾ブースターパック</text:p>
          </table:table-cell>
          <table:table-cell table:formula="of:=VLOOKUP([.G315];[$収録番号.$A$1:$収録番号.$B$9];2;0)" office:value-type="float" office:value="45" calcext:value-type="float">
            <text:p>45</text:p>
          </table:table-cell>
          <table:table-cell office:value-type="string" calcext:value-type="string">
            <text:p>SR</text:p>
          </table:table-cell>
          <table:table-cell table:formula="of:=VLOOKUP([.I315];[$レアリティ番号.$A$1:$レアリティ番号.$B$4];2;0)" office:value-type="float" office:value="4" calcext:value-type="float">
            <text:p>4</text:p>
          </table:table-cell>
          <table:table-cell office:value-type="string" calcext:value-type="string">
            <text:p>イジン</text:p>
          </table:table-cell>
          <table:table-cell table:formula="of:=VLOOKUP([.K315];[$種類番号.$A$1:$種類番号.$B$4];2;0)" office:value-type="float" office:value="1" calcext:value-type="float">
            <text:p>1</text:p>
          </table:table-cell>
          <table:table-cell office:value-type="string" calcext:value-type="string">
            <text:p>緑</text:p>
          </table:table-cell>
          <table:table-cell table:formula="of:=VLOOKUP([.M315];[$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1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15];[$特性番号.$A$1:$特性番号.$B$8];2;0);0)" office:value-type="float" office:value="0" calcext:value-type="float">
            <text:p>0</text:p>
          </table:table-cell>
          <table:table-cell office:value-type="string" calcext:value-type="string">
            <text:p>戦場に置かれたとき「マリョク配置権+1する」か「自分の墓地のハイケイすべてを手札に戻す」のどちらかを発揮する。¶自分はハイケイ使用に際し、色条件を満たしていなくても手札のカードを使える。</text:p>
          </table:table-cell>
          <table:table-cell table:style-name="ce8" office:value-type="string" calcext:value-type="string">
            <text:p>1ドローする</text:p>
          </table:table-cell>
          <table:table-cell table:formula="of:=IFERROR(VLOOKUP([.$V315];[$遺業能力番号.$A$1:$遺業能力番号.$B$9];2;0);0)" office:value-type="float" office:value="4" calcext:value-type="float">
            <text:p>4</text:p>
          </table:table-cell>
          <table:table-cell office:value-type="string" calcext:value-type="string">
            <text:p>https://one-draw.jp/ijinden/cardlist/004/card/04_006.png</text:p>
          </table:table-cell>
          <table:table-cell table:formula="of:=CONCATENATE([$JSON.$A$1];[.$C315];[$JSON.$B$1];[.$E315];[$JSON.$C$1];[.$F315];[$JSON.$D$1];IF(ISNA([.$S315]);&quot;null&quot;;&quot;&quot;&quot;&quot;&amp;[.$S315]&amp;&quot;&quot;&quot;&quot;);[$JSON.$E$1];[.$U315];[$JSON.$F$1];IF(ISNA([.$V315]);&quot;null&quot;;&quot;&quot;&quot;&quot;&amp;[.$V315]&amp;&quot;&quot;&quot;&quot;);[$JSON.$G$1];[.$X315];[$JSON.$H$1];[.$H315];[$JSON.$I$1];[.J315];[$JSON.$J$1];[.$L315];[$JSON.$K$1];[.$O315];[$JSON.$L$1];[.$N315];[$JSON.$M$1];[.$R315];[$JSON.$N$1];[.$T315];[$JSON.$O$1];[.$W315];[$JSON.$P$1];[.$A315];[$JSON.$Q$1];[.$B315];[$JSON.$R$1])" office:value-type="string" office:string-value="{&quot;id&quot;:&quot;4-06&quot;,&quot;name&quot;:&quot;伊能忠敬&quot;,&quot;kana&quot;:&quot;いのうただたか&quot;,&quot;traitText&quot;:null,&quot;ruleText&quot;:&quot;戦場に置かれたとき「マリョク配置権+1する」か「自分の墓地のハイケイすべてを手札に戻す」のどちらかを発揮する。¶自分はハイケイ使用に際し、色条件を満たしていなくても手札のカードを使える。&quot;,&quot;legacyText&quot;:&quot;1ドローする&quot;,&quot;imageUrl&quot;:&quot;https://one-draw.jp/ijinden/cardlist/004/card/04_006.png&quot;,&quot;expansion&quot;:45,&quot;rarity&quot;:4,&quot;type&quot;:1,&quot;level&quot;:4,&quot;color&quot;:4,&quot;term&quot;:0,&quot;trait&quot;:0,&quot;legacy&quot;:4,&quot;orderTable&quot;:315,&quot;orderDeck&quot;:130}," calcext:value-type="string">
            <text:p>{"id":"4-06","name":"伊能忠敬","kana":"いのうただたか","traitText":null,"ruleText":"戦場に置かれたとき「マリョク配置権+1する」か「自分の墓地のハイケイすべてを手札に戻す」のどちらかを発揮する。¶自分はハイケイ使用に際し、色条件を満たしていなくても手札のカードを使える。","legacyText":"1ドローする","imageUrl":"https://one-draw.jp/ijinden/cardlist/004/card/04_006.png","expansion":45,"rarity":4,"type":1,"level":4,"color":4,"term":0,"trait":0,"legacy":4,"orderTable":315,"orderDeck":130},</text:p>
          </table:table-cell>
          <table:table-cell table:number-columns-repeated="16347"/>
        </table:table-row>
        <table:table-row table:style-name="ro2">
          <table:table-cell office:value-type="float" office:value="316" calcext:value-type="float">
            <text:p>316</text:p>
          </table:table-cell>
          <table:table-cell office:value-type="float" office:value="137" calcext:value-type="float">
            <text:p>137</text:p>
          </table:table-cell>
          <table:table-cell office:value-type="string" calcext:value-type="string">
            <text:p>4-07</text:p>
          </table:table-cell>
          <table:table-cell office:value-type="float" office:value="7" calcext:value-type="float">
            <text:p>7</text:p>
          </table:table-cell>
          <table:table-cell office:value-type="string" calcext:value-type="string">
            <text:p>アリエノール・ダキテーヌ</text:p>
          </table:table-cell>
          <table:table-cell office:value-type="string" calcext:value-type="string">
            <text:p>ありえのーるだきてーぬ</text:p>
          </table:table-cell>
          <table:table-cell office:value-type="string" calcext:value-type="string">
            <text:p>第４弾ブースターパック</text:p>
          </table:table-cell>
          <table:table-cell table:formula="of:=VLOOKUP([.G316];[$収録番号.$A$1:$収録番号.$B$9];2;0)" office:value-type="float" office:value="45" calcext:value-type="float">
            <text:p>45</text:p>
          </table:table-cell>
          <table:table-cell office:value-type="string" calcext:value-type="string">
            <text:p>SR</text:p>
          </table:table-cell>
          <table:table-cell table:formula="of:=VLOOKUP([.I316];[$レアリティ番号.$A$1:$レアリティ番号.$B$4];2;0)" office:value-type="float" office:value="4" calcext:value-type="float">
            <text:p>4</text:p>
          </table:table-cell>
          <table:table-cell office:value-type="string" calcext:value-type="string">
            <text:p>イジン</text:p>
          </table:table-cell>
          <table:table-cell table:formula="of:=VLOOKUP([.K316];[$種類番号.$A$1:$種類番号.$B$4];2;0)" office:value-type="float" office:value="1" calcext:value-type="float">
            <text:p>1</text:p>
          </table:table-cell>
          <table:table-cell office:value-type="string" calcext:value-type="string">
            <text:p>黄</text:p>
          </table:table-cell>
          <table:table-cell table:formula="of:=VLOOKUP([.M316];[$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1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16];[$特性番号.$A$1:$特性番号.$B$8];2;0);0)" office:value-type="float" office:value="0" calcext:value-type="float">
            <text:p>0</text:p>
          </table:table-cell>
          <table:table-cell office:value-type="string" calcext:value-type="string">
            <text:p>これが戦場にいる間、自分の魔力ゾーンのマリョクは「色：赤 青」を得る。¶破壊されたとき、自分の山札の上から2枚を墓地に置いて発動できる。これを破壊されていない状態にする。</text:p>
          </table:table-cell>
          <table:table-cell table:style-name="ce8" office:value-type="string" calcext:value-type="string">
            <text:p>魔力化</text:p>
          </table:table-cell>
          <table:table-cell table:formula="of:=IFERROR(VLOOKUP([.$V316];[$遺業能力番号.$A$1:$遺業能力番号.$B$9];2;0);0)" office:value-type="float" office:value="1" calcext:value-type="float">
            <text:p>1</text:p>
          </table:table-cell>
          <table:table-cell office:value-type="string" calcext:value-type="string">
            <text:p>https://one-draw.jp/ijinden/cardlist/004/card/04_007.png</text:p>
          </table:table-cell>
          <table:table-cell table:formula="of:=CONCATENATE([$JSON.$A$1];[.$C316];[$JSON.$B$1];[.$E316];[$JSON.$C$1];[.$F316];[$JSON.$D$1];IF(ISNA([.$S316]);&quot;null&quot;;&quot;&quot;&quot;&quot;&amp;[.$S316]&amp;&quot;&quot;&quot;&quot;);[$JSON.$E$1];[.$U316];[$JSON.$F$1];IF(ISNA([.$V316]);&quot;null&quot;;&quot;&quot;&quot;&quot;&amp;[.$V316]&amp;&quot;&quot;&quot;&quot;);[$JSON.$G$1];[.$X316];[$JSON.$H$1];[.$H316];[$JSON.$I$1];[.J316];[$JSON.$J$1];[.$L316];[$JSON.$K$1];[.$O316];[$JSON.$L$1];[.$N316];[$JSON.$M$1];[.$R316];[$JSON.$N$1];[.$T316];[$JSON.$O$1];[.$W316];[$JSON.$P$1];[.$A316];[$JSON.$Q$1];[.$B316];[$JSON.$R$1])" office:value-type="string" office:string-value="{&quot;id&quot;:&quot;4-07&quot;,&quot;name&quot;:&quot;アリエノール・ダキテーヌ&quot;,&quot;kana&quot;:&quot;ありえのーるだきてーぬ&quot;,&quot;traitText&quot;:null,&quot;ruleText&quot;:&quot;これが戦場にいる間、自分の魔力ゾーンのマリョクは「色：赤 青」を得る。¶破壊されたとき、自分の山札の上から2枚を墓地に置いて発動できる。これを破壊されていない状態にする。&quot;,&quot;legacyText&quot;:&quot;魔力化&quot;,&quot;imageUrl&quot;:&quot;https://one-draw.jp/ijinden/cardlist/004/card/04_007.png&quot;,&quot;expansion&quot;:45,&quot;rarity&quot;:4,&quot;type&quot;:1,&quot;level&quot;:4,&quot;color&quot;:8,&quot;term&quot;:0,&quot;trait&quot;:0,&quot;legacy&quot;:1,&quot;orderTable&quot;:316,&quot;orderDeck&quot;:137}," calcext:value-type="string">
            <text:p>{"id":"4-07","name":"アリエノール・ダキテーヌ","kana":"ありえのーるだきてーぬ","traitText":null,"ruleText":"これが戦場にいる間、自分の魔力ゾーンのマリョクは「色：赤 青」を得る。¶破壊されたとき、自分の山札の上から2枚を墓地に置いて発動できる。これを破壊されていない状態にする。","legacyText":"魔力化","imageUrl":"https://one-draw.jp/ijinden/cardlist/004/card/04_007.png","expansion":45,"rarity":4,"type":1,"level":4,"color":8,"term":0,"trait":0,"legacy":1,"orderTable":316,"orderDeck":137},</text:p>
          </table:table-cell>
          <table:table-cell table:number-columns-repeated="16347"/>
        </table:table-row>
        <table:table-row table:style-name="ro2">
          <table:table-cell office:value-type="float" office:value="317" calcext:value-type="float">
            <text:p>317</text:p>
          </table:table-cell>
          <table:table-cell office:value-type="float" office:value="217" calcext:value-type="float">
            <text:p>217</text:p>
          </table:table-cell>
          <table:table-cell office:value-type="string" calcext:value-type="string">
            <text:p>4-08</text:p>
          </table:table-cell>
          <table:table-cell office:value-type="float" office:value="8" calcext:value-type="float">
            <text:p>8</text:p>
          </table:table-cell>
          <table:table-cell office:value-type="string" calcext:value-type="string">
            <text:p>アルキメデス</text:p>
          </table:table-cell>
          <table:table-cell office:value-type="string" calcext:value-type="string">
            <text:p>あるきめです</text:p>
          </table:table-cell>
          <table:table-cell office:value-type="string" calcext:value-type="string">
            <text:p>第４弾ブースターパック</text:p>
          </table:table-cell>
          <table:table-cell table:formula="of:=VLOOKUP([.G317];[$収録番号.$A$1:$収録番号.$B$9];2;0)" office:value-type="float" office:value="45" calcext:value-type="float">
            <text:p>45</text:p>
          </table:table-cell>
          <table:table-cell office:value-type="string" calcext:value-type="string">
            <text:p>SR</text:p>
          </table:table-cell>
          <table:table-cell table:formula="of:=VLOOKUP([.I317];[$レアリティ番号.$A$1:$レアリティ番号.$B$4];2;0)" office:value-type="float" office:value="4" calcext:value-type="float">
            <text:p>4</text:p>
          </table:table-cell>
          <table:table-cell office:value-type="string" calcext:value-type="string">
            <text:p>イジン</text:p>
          </table:table-cell>
          <table:table-cell table:formula="of:=VLOOKUP([.K317];[$種類番号.$A$1:$種類番号.$B$4];2;0)" office:value-type="float" office:value="1" calcext:value-type="float">
            <text:p>1</text:p>
          </table:table-cell>
          <table:table-cell office:value-type="string" calcext:value-type="string">
            <text:p>黄</text:p>
          </table:table-cell>
          <table:table-cell table:formula="of:=VLOOKUP([.M317];[$色番号.$A$1:$色番号.$B$10];2;0)" office:value-type="float" office:value="8" calcext:value-type="float">
            <text:p>8</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1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17];[$特性番号.$A$1:$特性番号.$B$8];2;0);0)" office:value-type="float" office:value="0" calcext:value-type="float">
            <text:p>0</text:p>
          </table:table-cell>
          <table:table-cell office:value-type="string" calcext:value-type="string">
            <text:p>ウォッチャー¶これのイジン召喚に際し、これのレベルは、自分の墓地の『魔導』能力を持つマホウ1つにつき1だけ下がる。¶戦場に置かれたとき、自分の墓地の『魔導』能力を持つマホウすべてを手札に戻す。</text:p>
          </table:table-cell>
          <table:table-cell table:style-name="ce8" office:value-type="string" calcext:value-type="string">
            <text:p>魔力化</text:p>
          </table:table-cell>
          <table:table-cell table:formula="of:=IFERROR(VLOOKUP([.$V317];[$遺業能力番号.$A$1:$遺業能力番号.$B$9];2;0);0)" office:value-type="float" office:value="1" calcext:value-type="float">
            <text:p>1</text:p>
          </table:table-cell>
          <table:table-cell office:value-type="string" calcext:value-type="string">
            <text:p>https://one-draw.jp/ijinden/cardlist/004/card/04_008.png</text:p>
          </table:table-cell>
          <table:table-cell table:formula="of:=CONCATENATE([$JSON.$A$1];[.$C317];[$JSON.$B$1];[.$E317];[$JSON.$C$1];[.$F317];[$JSON.$D$1];IF(ISNA([.$S317]);&quot;null&quot;;&quot;&quot;&quot;&quot;&amp;[.$S317]&amp;&quot;&quot;&quot;&quot;);[$JSON.$E$1];[.$U317];[$JSON.$F$1];IF(ISNA([.$V317]);&quot;null&quot;;&quot;&quot;&quot;&quot;&amp;[.$V317]&amp;&quot;&quot;&quot;&quot;);[$JSON.$G$1];[.$X317];[$JSON.$H$1];[.$H317];[$JSON.$I$1];[.J317];[$JSON.$J$1];[.$L317];[$JSON.$K$1];[.$O317];[$JSON.$L$1];[.$N317];[$JSON.$M$1];[.$R317];[$JSON.$N$1];[.$T317];[$JSON.$O$1];[.$W317];[$JSON.$P$1];[.$A317];[$JSON.$Q$1];[.$B317];[$JSON.$R$1])" office:value-type="string" office:string-value="{&quot;id&quot;:&quot;4-08&quot;,&quot;name&quot;:&quot;アルキメデス&quot;,&quot;kana&quot;:&quot;あるきめです&quot;,&quot;traitText&quot;:null,&quot;ruleText&quot;:&quot;ウォッチャー¶これのイジン召喚に際し、これのレベルは、自分の墓地の『魔導』能力を持つマホウ1つにつき1だけ下がる。¶戦場に置かれたとき、自分の墓地の『魔導』能力を持つマホウすべてを手札に戻す。&quot;,&quot;legacyText&quot;:&quot;魔力化&quot;,&quot;imageUrl&quot;:&quot;https://one-draw.jp/ijinden/cardlist/004/card/04_008.png&quot;,&quot;expansion&quot;:45,&quot;rarity&quot;:4,&quot;type&quot;:1,&quot;level&quot;:7,&quot;color&quot;:8,&quot;term&quot;:0,&quot;trait&quot;:0,&quot;legacy&quot;:1,&quot;orderTable&quot;:317,&quot;orderDeck&quot;:217}," calcext:value-type="string">
            <text:p>{"id":"4-08","name":"アルキメデス","kana":"あるきめです","traitText":null,"ruleText":"ウォッチャー¶これのイジン召喚に際し、これのレベルは、自分の墓地の『魔導』能力を持つマホウ1つにつき1だけ下がる。¶戦場に置かれたとき、自分の墓地の『魔導』能力を持つマホウすべてを手札に戻す。","legacyText":"魔力化","imageUrl":"https://one-draw.jp/ijinden/cardlist/004/card/04_008.png","expansion":45,"rarity":4,"type":1,"level":7,"color":8,"term":0,"trait":0,"legacy":1,"orderTable":317,"orderDeck":217},</text:p>
          </table:table-cell>
          <table:table-cell table:number-columns-repeated="16347"/>
        </table:table-row>
        <table:table-row table:style-name="ro2">
          <table:table-cell office:value-type="float" office:value="318" calcext:value-type="float">
            <text:p>318</text:p>
          </table:table-cell>
          <table:table-cell office:value-type="float" office:value="178" calcext:value-type="float">
            <text:p>178</text:p>
          </table:table-cell>
          <table:table-cell office:value-type="string" calcext:value-type="string">
            <text:p>4-09</text:p>
          </table:table-cell>
          <table:table-cell office:value-type="float" office:value="9" calcext:value-type="float">
            <text:p>9</text:p>
          </table:table-cell>
          <table:table-cell office:value-type="string" calcext:value-type="string">
            <text:p>レオニダス</text:p>
          </table:table-cell>
          <table:table-cell office:value-type="string" calcext:value-type="string">
            <text:p>れおにだす</text:p>
          </table:table-cell>
          <table:table-cell office:value-type="string" calcext:value-type="string">
            <text:p>第４弾ブースターパック</text:p>
          </table:table-cell>
          <table:table-cell table:formula="of:=VLOOKUP([.G318];[$収録番号.$A$1:$収録番号.$B$9];2;0)" office:value-type="float" office:value="45" calcext:value-type="float">
            <text:p>45</text:p>
          </table:table-cell>
          <table:table-cell office:value-type="string" calcext:value-type="string">
            <text:p>SR</text:p>
          </table:table-cell>
          <table:table-cell table:formula="of:=VLOOKUP([.I318];[$レアリティ番号.$A$1:$レアリティ番号.$B$4];2;0)" office:value-type="float" office:value="4" calcext:value-type="float">
            <text:p>4</text:p>
          </table:table-cell>
          <table:table-cell office:value-type="string" calcext:value-type="string">
            <text:p>イジン</text:p>
          </table:table-cell>
          <table:table-cell table:formula="of:=VLOOKUP([.K318];[$種類番号.$A$1:$種類番号.$B$4];2;0)" office:value-type="float" office:value="1" calcext:value-type="float">
            <text:p>1</text:p>
          </table:table-cell>
          <table:table-cell office:value-type="string" calcext:value-type="string">
            <text:p>紫</text:p>
          </table:table-cell>
          <table:table-cell table:formula="of:=VLOOKUP([.M318];[$色番号.$A$1:$色番号.$B$10];2;0)" office:value-type="float" office:value="16" calcext:value-type="float">
            <text:p>16</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1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18];[$特性番号.$A$1:$特性番号.$B$8];2;0);0)" office:value-type="float" office:value="0" calcext:value-type="float">
            <text:p>0</text:p>
          </table:table-cell>
          <table:table-cell office:value-type="string" calcext:value-type="string">
            <text:p>戦場に置かれたとき、相手の山札の上から5枚を墓地に置く。¶カードが墓地に30枚以上ある間「即応 モータル」を得る。</text:p>
          </table:table-cell>
          <table:table-cell table:style-name="ce8" table:formula="of:=NA()" office:value-type="string" office:string-value="" calcext:value-type="error">
            <text:p>#N/A</text:p>
          </table:table-cell>
          <table:table-cell table:formula="of:=IFERROR(VLOOKUP([.$V318];[$遺業能力番号.$A$1:$遺業能力番号.$B$9];2;0);0)" office:value-type="float" office:value="0" calcext:value-type="float">
            <text:p>0</text:p>
          </table:table-cell>
          <table:table-cell office:value-type="string" calcext:value-type="string">
            <text:p>https://one-draw.jp/ijinden/cardlist/004/card/04_009.png</text:p>
          </table:table-cell>
          <table:table-cell table:formula="of:=CONCATENATE([$JSON.$A$1];[.$C318];[$JSON.$B$1];[.$E318];[$JSON.$C$1];[.$F318];[$JSON.$D$1];IF(ISNA([.$S318]);&quot;null&quot;;&quot;&quot;&quot;&quot;&amp;[.$S318]&amp;&quot;&quot;&quot;&quot;);[$JSON.$E$1];[.$U318];[$JSON.$F$1];IF(ISNA([.$V318]);&quot;null&quot;;&quot;&quot;&quot;&quot;&amp;[.$V318]&amp;&quot;&quot;&quot;&quot;);[$JSON.$G$1];[.$X318];[$JSON.$H$1];[.$H318];[$JSON.$I$1];[.J318];[$JSON.$J$1];[.$L318];[$JSON.$K$1];[.$O318];[$JSON.$L$1];[.$N318];[$JSON.$M$1];[.$R318];[$JSON.$N$1];[.$T318];[$JSON.$O$1];[.$W318];[$JSON.$P$1];[.$A318];[$JSON.$Q$1];[.$B318];[$JSON.$R$1])" office:value-type="string" office:string-value="{&quot;id&quot;:&quot;4-09&quot;,&quot;name&quot;:&quot;レオニダス&quot;,&quot;kana&quot;:&quot;れおにだす&quot;,&quot;traitText&quot;:null,&quot;ruleText&quot;:&quot;戦場に置かれたとき、相手の山札の上から5枚を墓地に置く。¶カードが墓地に30枚以上ある間「即応 モータル」を得る。&quot;,&quot;legacyText&quot;:null,&quot;imageUrl&quot;:&quot;https://one-draw.jp/ijinden/cardlist/004/card/04_009.png&quot;,&quot;expansion&quot;:45,&quot;rarity&quot;:4,&quot;type&quot;:1,&quot;level&quot;:5,&quot;color&quot;:16,&quot;term&quot;:0,&quot;trait&quot;:0,&quot;legacy&quot;:0,&quot;orderTable&quot;:318,&quot;orderDeck&quot;:178}," calcext:value-type="string">
            <text:p>{"id":"4-09","name":"レオニダス","kana":"れおにだす","traitText":null,"ruleText":"戦場に置かれたとき、相手の山札の上から5枚を墓地に置く。¶カードが墓地に30枚以上ある間「即応 モータル」を得る。","legacyText":null,"imageUrl":"https://one-draw.jp/ijinden/cardlist/004/card/04_009.png","expansion":45,"rarity":4,"type":1,"level":5,"color":16,"term":0,"trait":0,"legacy":0,"orderTable":318,"orderDeck":178},</text:p>
          </table:table-cell>
          <table:table-cell table:number-columns-repeated="16347"/>
        </table:table-row>
        <table:table-row table:style-name="ro2">
          <table:table-cell office:value-type="float" office:value="319" calcext:value-type="float">
            <text:p>319</text:p>
          </table:table-cell>
          <table:table-cell office:value-type="float" office:value="235" calcext:value-type="float">
            <text:p>235</text:p>
          </table:table-cell>
          <table:table-cell office:value-type="string" calcext:value-type="string">
            <text:p>4-10</text:p>
          </table:table-cell>
          <table:table-cell office:value-type="float" office:value="10" calcext:value-type="float">
            <text:p>10</text:p>
          </table:table-cell>
          <table:table-cell office:value-type="string" calcext:value-type="string">
            <text:p>カール大帝</text:p>
          </table:table-cell>
          <table:table-cell office:value-type="string" calcext:value-type="string">
            <text:p>かーるたいてい</text:p>
          </table:table-cell>
          <table:table-cell office:value-type="string" calcext:value-type="string">
            <text:p>第４弾ブースターパック</text:p>
          </table:table-cell>
          <table:table-cell table:formula="of:=VLOOKUP([.G319];[$収録番号.$A$1:$収録番号.$B$9];2;0)" office:value-type="float" office:value="45" calcext:value-type="float">
            <text:p>45</text:p>
          </table:table-cell>
          <table:table-cell office:value-type="string" calcext:value-type="string">
            <text:p>SR</text:p>
          </table:table-cell>
          <table:table-cell table:formula="of:=VLOOKUP([.I319];[$レアリティ番号.$A$1:$レアリティ番号.$B$4];2;0)" office:value-type="float" office:value="4" calcext:value-type="float">
            <text:p>4</text:p>
          </table:table-cell>
          <table:table-cell office:value-type="string" calcext:value-type="string">
            <text:p>イジン</text:p>
          </table:table-cell>
          <table:table-cell table:formula="of:=VLOOKUP([.K319];[$種類番号.$A$1:$種類番号.$B$4];2;0)" office:value-type="float" office:value="1" calcext:value-type="float">
            <text:p>1</text:p>
          </table:table-cell>
          <table:table-cell office:value-type="string" calcext:value-type="string">
            <text:p>紫</text:p>
          </table:table-cell>
          <table:table-cell table:formula="of:=VLOOKUP([.M319];[$色番号.$A$1:$色番号.$B$10];2;0)" office:value-type="float" office:value="16" calcext:value-type="float">
            <text:p>16</text:p>
          </table:table-cell>
          <table:table-cell office:value-type="float" office:value="10" calcext:value-type="float">
            <text:p>1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1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19];[$特性番号.$A$1:$特性番号.$B$8];2;0);0)" office:value-type="float" office:value="0" calcext:value-type="float">
            <text:p>0</text:p>
          </table:table-cell>
          <table:table-cell office:value-type="string" calcext:value-type="string">
            <text:p>これのイジン召喚に際し、これのレベルは、相手の魔力ゾーンの色1つにつき2だけ下がる。¶自分のエンドフェイズが開始したとき、相手の山札の上から1枚をめくって発動できる。そのカードの色を持つ相手の戦場のイジンすべてを裏にする。</text:p>
          </table:table-cell>
          <table:table-cell table:style-name="ce8" table:formula="of:=NA()" office:value-type="string" office:string-value="" calcext:value-type="error">
            <text:p>#N/A</text:p>
          </table:table-cell>
          <table:table-cell table:formula="of:=IFERROR(VLOOKUP([.$V319];[$遺業能力番号.$A$1:$遺業能力番号.$B$9];2;0);0)" office:value-type="float" office:value="0" calcext:value-type="float">
            <text:p>0</text:p>
          </table:table-cell>
          <table:table-cell office:value-type="string" calcext:value-type="string">
            <text:p>https://one-draw.jp/ijinden/cardlist/004/card/04_010.png</text:p>
          </table:table-cell>
          <table:table-cell table:formula="of:=CONCATENATE([$JSON.$A$1];[.$C319];[$JSON.$B$1];[.$E319];[$JSON.$C$1];[.$F319];[$JSON.$D$1];IF(ISNA([.$S319]);&quot;null&quot;;&quot;&quot;&quot;&quot;&amp;[.$S319]&amp;&quot;&quot;&quot;&quot;);[$JSON.$E$1];[.$U319];[$JSON.$F$1];IF(ISNA([.$V319]);&quot;null&quot;;&quot;&quot;&quot;&quot;&amp;[.$V319]&amp;&quot;&quot;&quot;&quot;);[$JSON.$G$1];[.$X319];[$JSON.$H$1];[.$H319];[$JSON.$I$1];[.J319];[$JSON.$J$1];[.$L319];[$JSON.$K$1];[.$O319];[$JSON.$L$1];[.$N319];[$JSON.$M$1];[.$R319];[$JSON.$N$1];[.$T319];[$JSON.$O$1];[.$W319];[$JSON.$P$1];[.$A319];[$JSON.$Q$1];[.$B319];[$JSON.$R$1])" office:value-type="string" office:string-value="{&quot;id&quot;:&quot;4-10&quot;,&quot;name&quot;:&quot;カール大帝&quot;,&quot;kana&quot;:&quot;かーるたいてい&quot;,&quot;traitText&quot;:null,&quot;ruleText&quot;:&quot;これのイジン召喚に際し、これのレベルは、相手の魔力ゾーンの色1つにつき2だけ下がる。¶自分のエンドフェイズが開始したとき、相手の山札の上から1枚をめくって発動できる。そのカードの色を持つ相手の戦場のイジンすべてを裏にする。&quot;,&quot;legacyText&quot;:null,&quot;imageUrl&quot;:&quot;https://one-draw.jp/ijinden/cardlist/004/card/04_010.png&quot;,&quot;expansion&quot;:45,&quot;rarity&quot;:4,&quot;type&quot;:1,&quot;level&quot;:10,&quot;color&quot;:16,&quot;term&quot;:0,&quot;trait&quot;:0,&quot;legacy&quot;:0,&quot;orderTable&quot;:319,&quot;orderDeck&quot;:235}," calcext:value-type="string">
            <text:p>{"id":"4-10","name":"カール大帝","kana":"かーるたいてい","traitText":null,"ruleText":"これのイジン召喚に際し、これのレベルは、相手の魔力ゾーンの色1つにつき2だけ下がる。¶自分のエンドフェイズが開始したとき、相手の山札の上から1枚をめくって発動できる。そのカードの色を持つ相手の戦場のイジンすべてを裏にする。","legacyText":null,"imageUrl":"https://one-draw.jp/ijinden/cardlist/004/card/04_010.png","expansion":45,"rarity":4,"type":1,"level":10,"color":16,"term":0,"trait":0,"legacy":0,"orderTable":319,"orderDeck":235},</text:p>
          </table:table-cell>
          <table:table-cell table:number-columns-repeated="16347"/>
        </table:table-row>
        <table:table-row table:style-name="ro2">
          <table:table-cell office:value-type="float" office:value="320" calcext:value-type="float">
            <text:p>320</text:p>
          </table:table-cell>
          <table:table-cell office:value-type="float" office:value="113" calcext:value-type="float">
            <text:p>113</text:p>
          </table:table-cell>
          <table:table-cell office:value-type="string" calcext:value-type="string">
            <text:p>4-11</text:p>
          </table:table-cell>
          <table:table-cell office:value-type="float" office:value="11" calcext:value-type="float">
            <text:p>11</text:p>
          </table:table-cell>
          <table:table-cell office:value-type="string" calcext:value-type="string">
            <text:p>島津斉彬</text:p>
          </table:table-cell>
          <table:table-cell office:value-type="string" calcext:value-type="string">
            <text:p>しまづなりあきら</text:p>
          </table:table-cell>
          <table:table-cell office:value-type="string" calcext:value-type="string">
            <text:p>第４弾ブースターパック</text:p>
          </table:table-cell>
          <table:table-cell table:formula="of:=VLOOKUP([.G320];[$収録番号.$A$1:$収録番号.$B$9];2;0)" office:value-type="float" office:value="45" calcext:value-type="float">
            <text:p>45</text:p>
          </table:table-cell>
          <table:table-cell office:value-type="string" calcext:value-type="string">
            <text:p>N</text:p>
          </table:table-cell>
          <table:table-cell table:formula="of:=VLOOKUP([.I320];[$レアリティ番号.$A$1:$レアリティ番号.$B$4];2;0)" office:value-type="float" office:value="1" calcext:value-type="float">
            <text:p>1</text:p>
          </table:table-cell>
          <table:table-cell office:value-type="string" calcext:value-type="string">
            <text:p>イジン</text:p>
          </table:table-cell>
          <table:table-cell table:formula="of:=VLOOKUP([.K320];[$種類番号.$A$1:$種類番号.$B$4];2;0)" office:value-type="float" office:value="1" calcext:value-type="float">
            <text:p>1</text:p>
          </table:table-cell>
          <table:table-cell office:value-type="string" calcext:value-type="string">
            <text:p>赤</text:p>
          </table:table-cell>
          <table:table-cell table:formula="of:=VLOOKUP([.M320];[$色番号.$A$1:$色番号.$B$10];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2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20];[$特性番号.$A$1:$特性番号.$B$8];2;0);0)" office:value-type="float" office:value="0" calcext:value-type="float">
            <text:p>0</text:p>
          </table:table-cell>
          <table:table-cell office:value-type="string" calcext:value-type="string">
            <text:p>これのイジン召喚に際し、これのレベルは、相手の戦場の起きているイジン1体につき1だけ下がる。¶戦場に置かれたとき、イジン召喚権+1する。</text:p>
          </table:table-cell>
          <table:table-cell table:style-name="ce8" office:value-type="string" calcext:value-type="string">
            <text:p>1ドローする</text:p>
          </table:table-cell>
          <table:table-cell table:formula="of:=IFERROR(VLOOKUP([.$V320];[$遺業能力番号.$A$1:$遺業能力番号.$B$9];2;0);0)" office:value-type="float" office:value="4" calcext:value-type="float">
            <text:p>4</text:p>
          </table:table-cell>
          <table:table-cell office:value-type="string" calcext:value-type="string">
            <text:p>https://one-draw.jp/ijinden/cardlist/004/card/04_011.png</text:p>
          </table:table-cell>
          <table:table-cell table:formula="of:=CONCATENATE([$JSON.$A$1];[.$C320];[$JSON.$B$1];[.$E320];[$JSON.$C$1];[.$F320];[$JSON.$D$1];IF(ISNA([.$S320]);&quot;null&quot;;&quot;&quot;&quot;&quot;&amp;[.$S320]&amp;&quot;&quot;&quot;&quot;);[$JSON.$E$1];[.$U320];[$JSON.$F$1];IF(ISNA([.$V320]);&quot;null&quot;;&quot;&quot;&quot;&quot;&amp;[.$V320]&amp;&quot;&quot;&quot;&quot;);[$JSON.$G$1];[.$X320];[$JSON.$H$1];[.$H320];[$JSON.$I$1];[.J320];[$JSON.$J$1];[.$L320];[$JSON.$K$1];[.$O320];[$JSON.$L$1];[.$N320];[$JSON.$M$1];[.$R320];[$JSON.$N$1];[.$T320];[$JSON.$O$1];[.$W320];[$JSON.$P$1];[.$A320];[$JSON.$Q$1];[.$B320];[$JSON.$R$1])" office:value-type="string" office:string-value="{&quot;id&quot;:&quot;4-11&quot;,&quot;name&quot;:&quot;島津斉彬&quot;,&quot;kana&quot;:&quot;しまづなりあきら&quot;,&quot;traitText&quot;:null,&quot;ruleText&quot;:&quot;これのイジン召喚に際し、これのレベルは、相手の戦場の起きているイジン1体につき1だけ下がる。¶戦場に置かれたとき、イジン召喚権+1する。&quot;,&quot;legacyText&quot;:&quot;1ドローする&quot;,&quot;imageUrl&quot;:&quot;https://one-draw.jp/ijinden/cardlist/004/card/04_011.png&quot;,&quot;expansion&quot;:45,&quot;rarity&quot;:1,&quot;type&quot;:1,&quot;level&quot;:4,&quot;color&quot;:1,&quot;term&quot;:0,&quot;trait&quot;:0,&quot;legacy&quot;:4,&quot;orderTable&quot;:320,&quot;orderDeck&quot;:113}," calcext:value-type="string">
            <text:p>{"id":"4-11","name":"島津斉彬","kana":"しまづなりあきら","traitText":null,"ruleText":"これのイジン召喚に際し、これのレベルは、相手の戦場の起きているイジン1体につき1だけ下がる。¶戦場に置かれたとき、イジン召喚権+1する。","legacyText":"1ドローする","imageUrl":"https://one-draw.jp/ijinden/cardlist/004/card/04_011.png","expansion":45,"rarity":1,"type":1,"level":4,"color":1,"term":0,"trait":0,"legacy":4,"orderTable":320,"orderDeck":113},</text:p>
          </table:table-cell>
          <table:table-cell table:number-columns-repeated="16347"/>
        </table:table-row>
        <table:table-row table:style-name="ro2">
          <table:table-cell office:value-type="float" office:value="321" calcext:value-type="float">
            <text:p>321</text:p>
          </table:table-cell>
          <table:table-cell office:value-type="float" office:value="30" calcext:value-type="float">
            <text:p>30</text:p>
          </table:table-cell>
          <table:table-cell office:value-type="string" calcext:value-type="string">
            <text:p>4-12</text:p>
          </table:table-cell>
          <table:table-cell office:value-type="float" office:value="12" calcext:value-type="float">
            <text:p>12</text:p>
          </table:table-cell>
          <table:table-cell office:value-type="string" calcext:value-type="string">
            <text:p>島津久光</text:p>
          </table:table-cell>
          <table:table-cell office:value-type="string" calcext:value-type="string">
            <text:p>しまづひさみつ</text:p>
          </table:table-cell>
          <table:table-cell office:value-type="string" calcext:value-type="string">
            <text:p>第４弾ブースターパック</text:p>
          </table:table-cell>
          <table:table-cell table:formula="of:=VLOOKUP([.G321];[$収録番号.$A$1:$収録番号.$B$9];2;0)" office:value-type="float" office:value="45" calcext:value-type="float">
            <text:p>45</text:p>
          </table:table-cell>
          <table:table-cell office:value-type="string" calcext:value-type="string">
            <text:p>N</text:p>
          </table:table-cell>
          <table:table-cell table:formula="of:=VLOOKUP([.I321];[$レアリティ番号.$A$1:$レアリティ番号.$B$4];2;0)" office:value-type="float" office:value="1" calcext:value-type="float">
            <text:p>1</text:p>
          </table:table-cell>
          <table:table-cell office:value-type="string" calcext:value-type="string">
            <text:p>イジン</text:p>
          </table:table-cell>
          <table:table-cell table:formula="of:=VLOOKUP([.K321];[$種類番号.$A$1:$種類番号.$B$4];2;0)" office:value-type="float" office:value="1" calcext:value-type="float">
            <text:p>1</text:p>
          </table:table-cell>
          <table:table-cell office:value-type="string" calcext:value-type="string">
            <text:p>赤</text:p>
          </table:table-cell>
          <table:table-cell table:formula="of:=VLOOKUP([.M321];[$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2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21];[$特性番号.$A$1:$特性番号.$B$8];2;0);0)" office:value-type="float" office:value="0" calcext:value-type="float">
            <text:p>0</text:p>
          </table:table-cell>
          <table:table-cell office:value-type="string" calcext:value-type="string">
            <text:p>この能力はターンに1回しか発動しない。赤でないイジンが戦場に置かれたとき、1ドローする。¶アタック+2000</text:p>
          </table:table-cell>
          <table:table-cell table:style-name="ce8" office:value-type="string" calcext:value-type="string">
            <text:p>1ドローする</text:p>
          </table:table-cell>
          <table:table-cell table:formula="of:=IFERROR(VLOOKUP([.$V321];[$遺業能力番号.$A$1:$遺業能力番号.$B$9];2;0);0)" office:value-type="float" office:value="4" calcext:value-type="float">
            <text:p>4</text:p>
          </table:table-cell>
          <table:table-cell office:value-type="string" calcext:value-type="string">
            <text:p>https://one-draw.jp/ijinden/cardlist/004/card/04_012.png</text:p>
          </table:table-cell>
          <table:table-cell table:formula="of:=CONCATENATE([$JSON.$A$1];[.$C321];[$JSON.$B$1];[.$E321];[$JSON.$C$1];[.$F321];[$JSON.$D$1];IF(ISNA([.$S321]);&quot;null&quot;;&quot;&quot;&quot;&quot;&amp;[.$S321]&amp;&quot;&quot;&quot;&quot;);[$JSON.$E$1];[.$U321];[$JSON.$F$1];IF(ISNA([.$V321]);&quot;null&quot;;&quot;&quot;&quot;&quot;&amp;[.$V321]&amp;&quot;&quot;&quot;&quot;);[$JSON.$G$1];[.$X321];[$JSON.$H$1];[.$H321];[$JSON.$I$1];[.J321];[$JSON.$J$1];[.$L321];[$JSON.$K$1];[.$O321];[$JSON.$L$1];[.$N321];[$JSON.$M$1];[.$R321];[$JSON.$N$1];[.$T321];[$JSON.$O$1];[.$W321];[$JSON.$P$1];[.$A321];[$JSON.$Q$1];[.$B321];[$JSON.$R$1])" office:value-type="string" office:string-value="{&quot;id&quot;:&quot;4-12&quot;,&quot;name&quot;:&quot;島津久光&quot;,&quot;kana&quot;:&quot;しまづひさみつ&quot;,&quot;traitText&quot;:null,&quot;ruleText&quot;:&quot;この能力はターンに1回しか発動しない。赤でないイジンが戦場に置かれたとき、1ドローする。¶アタック+2000&quot;,&quot;legacyText&quot;:&quot;1ドローする&quot;,&quot;imageUrl&quot;:&quot;https://one-draw.jp/ijinden/cardlist/004/card/04_012.png&quot;,&quot;expansion&quot;:45,&quot;rarity&quot;:1,&quot;type&quot;:1,&quot;level&quot;:2,&quot;color&quot;:1,&quot;term&quot;:0,&quot;trait&quot;:0,&quot;legacy&quot;:4,&quot;orderTable&quot;:321,&quot;orderDeck&quot;:30}," calcext:value-type="string">
            <text:p>{"id":"4-12","name":"島津久光","kana":"しまづひさみつ","traitText":null,"ruleText":"この能力はターンに1回しか発動しない。赤でないイジンが戦場に置かれたとき、1ドローする。¶アタック+2000","legacyText":"1ドローする","imageUrl":"https://one-draw.jp/ijinden/cardlist/004/card/04_012.png","expansion":45,"rarity":1,"type":1,"level":2,"color":1,"term":0,"trait":0,"legacy":4,"orderTable":321,"orderDeck":30},</text:p>
          </table:table-cell>
          <table:table-cell table:number-columns-repeated="16347"/>
        </table:table-row>
        <table:table-row table:style-name="ro2">
          <table:table-cell office:value-type="float" office:value="322" calcext:value-type="float">
            <text:p>322</text:p>
          </table:table-cell>
          <table:table-cell office:value-type="float" office:value="152" calcext:value-type="float">
            <text:p>152</text:p>
          </table:table-cell>
          <table:table-cell office:value-type="string" calcext:value-type="string">
            <text:p>4-13</text:p>
          </table:table-cell>
          <table:table-cell office:value-type="float" office:value="13" calcext:value-type="float">
            <text:p>13</text:p>
          </table:table-cell>
          <table:table-cell office:value-type="string" calcext:value-type="string">
            <text:p>大久保利通</text:p>
          </table:table-cell>
          <table:table-cell office:value-type="string" calcext:value-type="string">
            <text:p>おおくぼとしみち</text:p>
          </table:table-cell>
          <table:table-cell office:value-type="string" calcext:value-type="string">
            <text:p>第４弾ブースターパック</text:p>
          </table:table-cell>
          <table:table-cell table:formula="of:=VLOOKUP([.G322];[$収録番号.$A$1:$収録番号.$B$9];2;0)" office:value-type="float" office:value="45" calcext:value-type="float">
            <text:p>45</text:p>
          </table:table-cell>
          <table:table-cell office:value-type="string" calcext:value-type="string">
            <text:p>N</text:p>
          </table:table-cell>
          <table:table-cell table:formula="of:=VLOOKUP([.I322];[$レアリティ番号.$A$1:$レアリティ番号.$B$4];2;0)" office:value-type="float" office:value="1" calcext:value-type="float">
            <text:p>1</text:p>
          </table:table-cell>
          <table:table-cell office:value-type="string" calcext:value-type="string">
            <text:p>イジン</text:p>
          </table:table-cell>
          <table:table-cell table:formula="of:=VLOOKUP([.K322];[$種類番号.$A$1:$種類番号.$B$4];2;0)" office:value-type="float" office:value="1" calcext:value-type="float">
            <text:p>1</text:p>
          </table:table-cell>
          <table:table-cell office:value-type="string" calcext:value-type="string">
            <text:p>赤</text:p>
          </table:table-cell>
          <table:table-cell table:formula="of:=VLOOKUP([.M322];[$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2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22];[$特性番号.$A$1:$特性番号.$B$8];2;0);0)" office:value-type="float" office:value="0" calcext:value-type="float">
            <text:p>0</text:p>
          </table:table-cell>
          <table:table-cell office:value-type="string" calcext:value-type="string">
            <text:p>自分がイジン1体だけでアタックしたとき、そのイジンがレベル6以上なら発動する。アタッカーすべては、このターンに限り「イジンにブロックされない」を得る。</text:p>
          </table:table-cell>
          <table:table-cell table:style-name="ce8" table:formula="of:=NA()" office:value-type="string" office:string-value="" calcext:value-type="error">
            <text:p>#N/A</text:p>
          </table:table-cell>
          <table:table-cell table:formula="of:=IFERROR(VLOOKUP([.$V322];[$遺業能力番号.$A$1:$遺業能力番号.$B$9];2;0);0)" office:value-type="float" office:value="0" calcext:value-type="float">
            <text:p>0</text:p>
          </table:table-cell>
          <table:table-cell office:value-type="string" calcext:value-type="string">
            <text:p>https://one-draw.jp/ijinden/cardlist/004/card/04_013.png</text:p>
          </table:table-cell>
          <table:table-cell table:formula="of:=CONCATENATE([$JSON.$A$1];[.$C322];[$JSON.$B$1];[.$E322];[$JSON.$C$1];[.$F322];[$JSON.$D$1];IF(ISNA([.$S322]);&quot;null&quot;;&quot;&quot;&quot;&quot;&amp;[.$S322]&amp;&quot;&quot;&quot;&quot;);[$JSON.$E$1];[.$U322];[$JSON.$F$1];IF(ISNA([.$V322]);&quot;null&quot;;&quot;&quot;&quot;&quot;&amp;[.$V322]&amp;&quot;&quot;&quot;&quot;);[$JSON.$G$1];[.$X322];[$JSON.$H$1];[.$H322];[$JSON.$I$1];[.J322];[$JSON.$J$1];[.$L322];[$JSON.$K$1];[.$O322];[$JSON.$L$1];[.$N322];[$JSON.$M$1];[.$R322];[$JSON.$N$1];[.$T322];[$JSON.$O$1];[.$W322];[$JSON.$P$1];[.$A322];[$JSON.$Q$1];[.$B322];[$JSON.$R$1])" office:value-type="string" office:string-value="{&quot;id&quot;:&quot;4-13&quot;,&quot;name&quot;:&quot;大久保利通&quot;,&quot;kana&quot;:&quot;おおくぼとしみち&quot;,&quot;traitText&quot;:null,&quot;ruleText&quot;:&quot;自分がイジン1体だけでアタックしたとき、そのイジンがレベル6以上なら発動する。アタッカーすべては、このターンに限り「イジンにブロックされない」を得る。&quot;,&quot;legacyText&quot;:null,&quot;imageUrl&quot;:&quot;https://one-draw.jp/ijinden/cardlist/004/card/04_013.png&quot;,&quot;expansion&quot;:45,&quot;rarity&quot;:1,&quot;type&quot;:1,&quot;level&quot;:5,&quot;color&quot;:1,&quot;term&quot;:0,&quot;trait&quot;:0,&quot;legacy&quot;:0,&quot;orderTable&quot;:322,&quot;orderDeck&quot;:152}," calcext:value-type="string">
            <text:p>{"id":"4-13","name":"大久保利通","kana":"おおくぼとしみち","traitText":null,"ruleText":"自分がイジン1体だけでアタックしたとき、そのイジンがレベル6以上なら発動する。アタッカーすべては、このターンに限り「イジンにブロックされない」を得る。","legacyText":null,"imageUrl":"https://one-draw.jp/ijinden/cardlist/004/card/04_013.png","expansion":45,"rarity":1,"type":1,"level":5,"color":1,"term":0,"trait":0,"legacy":0,"orderTable":322,"orderDeck":152},</text:p>
          </table:table-cell>
          <table:table-cell table:number-columns-repeated="16347"/>
        </table:table-row>
        <table:table-row table:style-name="ro2">
          <table:table-cell office:value-type="float" office:value="323" calcext:value-type="float">
            <text:p>323</text:p>
          </table:table-cell>
          <table:table-cell office:value-type="float" office:value="153" calcext:value-type="float">
            <text:p>153</text:p>
          </table:table-cell>
          <table:table-cell office:value-type="string" calcext:value-type="string">
            <text:p>4-14</text:p>
          </table:table-cell>
          <table:table-cell office:value-type="float" office:value="14" calcext:value-type="float">
            <text:p>14</text:p>
          </table:table-cell>
          <table:table-cell office:value-type="string" calcext:value-type="string">
            <text:p>ジェームズ・ハーグリーブズ</text:p>
          </table:table-cell>
          <table:table-cell office:value-type="string" calcext:value-type="string">
            <text:p>じぇーむずはーぐりーぶず</text:p>
          </table:table-cell>
          <table:table-cell office:value-type="string" calcext:value-type="string">
            <text:p>第４弾ブースターパック</text:p>
          </table:table-cell>
          <table:table-cell table:formula="of:=VLOOKUP([.G323];[$収録番号.$A$1:$収録番号.$B$9];2;0)" office:value-type="float" office:value="45" calcext:value-type="float">
            <text:p>45</text:p>
          </table:table-cell>
          <table:table-cell office:value-type="string" calcext:value-type="string">
            <text:p>N</text:p>
          </table:table-cell>
          <table:table-cell table:formula="of:=VLOOKUP([.I323];[$レアリティ番号.$A$1:$レアリティ番号.$B$4];2;0)" office:value-type="float" office:value="1" calcext:value-type="float">
            <text:p>1</text:p>
          </table:table-cell>
          <table:table-cell office:value-type="string" calcext:value-type="string">
            <text:p>イジン</text:p>
          </table:table-cell>
          <table:table-cell table:formula="of:=VLOOKUP([.K323];[$種類番号.$A$1:$種類番号.$B$4];2;0)" office:value-type="float" office:value="1" calcext:value-type="float">
            <text:p>1</text:p>
          </table:table-cell>
          <table:table-cell office:value-type="string" calcext:value-type="string">
            <text:p>赤</text:p>
          </table:table-cell>
          <table:table-cell table:formula="of:=VLOOKUP([.M323];[$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2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23];[$特性番号.$A$1:$特性番号.$B$8];2;0);0)" office:value-type="float" office:value="0" calcext:value-type="float">
            <text:p>0</text:p>
          </table:table-cell>
          <table:table-cell office:value-type="string" calcext:value-type="string">
            <text:p>これのイジン召喚に際し、自分の魔力ゾーンに裏のカードがないなら、これは「レベル3」になる。¶戦場に置かれたとき、魔力ゾーンの裏のカード1つを手札に戻す。</text:p>
          </table:table-cell>
          <table:table-cell table:style-name="ce8" table:formula="of:=NA()" office:value-type="string" office:string-value="" calcext:value-type="error">
            <text:p>#N/A</text:p>
          </table:table-cell>
          <table:table-cell table:formula="of:=IFERROR(VLOOKUP([.$V323];[$遺業能力番号.$A$1:$遺業能力番号.$B$9];2;0);0)" office:value-type="float" office:value="0" calcext:value-type="float">
            <text:p>0</text:p>
          </table:table-cell>
          <table:table-cell office:value-type="string" calcext:value-type="string">
            <text:p>https://one-draw.jp/ijinden/cardlist/004/card/04_014.png</text:p>
          </table:table-cell>
          <table:table-cell table:formula="of:=CONCATENATE([$JSON.$A$1];[.$C323];[$JSON.$B$1];[.$E323];[$JSON.$C$1];[.$F323];[$JSON.$D$1];IF(ISNA([.$S323]);&quot;null&quot;;&quot;&quot;&quot;&quot;&amp;[.$S323]&amp;&quot;&quot;&quot;&quot;);[$JSON.$E$1];[.$U323];[$JSON.$F$1];IF(ISNA([.$V323]);&quot;null&quot;;&quot;&quot;&quot;&quot;&amp;[.$V323]&amp;&quot;&quot;&quot;&quot;);[$JSON.$G$1];[.$X323];[$JSON.$H$1];[.$H323];[$JSON.$I$1];[.J323];[$JSON.$J$1];[.$L323];[$JSON.$K$1];[.$O323];[$JSON.$L$1];[.$N323];[$JSON.$M$1];[.$R323];[$JSON.$N$1];[.$T323];[$JSON.$O$1];[.$W323];[$JSON.$P$1];[.$A323];[$JSON.$Q$1];[.$B323];[$JSON.$R$1])" office:value-type="string" office:string-value="{&quot;id&quot;:&quot;4-14&quot;,&quot;name&quot;:&quot;ジェームズ・ハーグリーブズ&quot;,&quot;kana&quot;:&quot;じぇーむずはーぐりーぶず&quot;,&quot;traitText&quot;:null,&quot;ruleText&quot;:&quot;これのイジン召喚に際し、自分の魔力ゾーンに裏のカードがないなら、これは「レベル3」になる。¶戦場に置かれたとき、魔力ゾーンの裏のカード1つを手札に戻す。&quot;,&quot;legacyText&quot;:null,&quot;imageUrl&quot;:&quot;https://one-draw.jp/ijinden/cardlist/004/card/04_014.png&quot;,&quot;expansion&quot;:45,&quot;rarity&quot;:1,&quot;type&quot;:1,&quot;level&quot;:5,&quot;color&quot;:1,&quot;term&quot;:0,&quot;trait&quot;:0,&quot;legacy&quot;:0,&quot;orderTable&quot;:323,&quot;orderDeck&quot;:153}," calcext:value-type="string">
            <text:p>{"id":"4-14","name":"ジェームズ・ハーグリーブズ","kana":"じぇーむずはーぐりーぶず","traitText":null,"ruleText":"これのイジン召喚に際し、自分の魔力ゾーンに裏のカードがないなら、これは「レベル3」になる。¶戦場に置かれたとき、魔力ゾーンの裏のカード1つを手札に戻す。","legacyText":null,"imageUrl":"https://one-draw.jp/ijinden/cardlist/004/card/04_014.png","expansion":45,"rarity":1,"type":1,"level":5,"color":1,"term":0,"trait":0,"legacy":0,"orderTable":323,"orderDeck":153},</text:p>
          </table:table-cell>
          <table:table-cell table:number-columns-repeated="16347"/>
        </table:table-row>
        <table:table-row table:style-name="ro2">
          <table:table-cell office:value-type="float" office:value="324" calcext:value-type="float">
            <text:p>324</text:p>
          </table:table-cell>
          <table:table-cell office:value-type="float" office:value="31" calcext:value-type="float">
            <text:p>31</text:p>
          </table:table-cell>
          <table:table-cell office:value-type="string" calcext:value-type="string">
            <text:p>4-15</text:p>
          </table:table-cell>
          <table:table-cell office:value-type="float" office:value="15" calcext:value-type="float">
            <text:p>15</text:p>
          </table:table-cell>
          <table:table-cell table:number-columns-repeated="2" office:value-type="string" calcext:value-type="string">
            <text:p>ねね</text:p>
          </table:table-cell>
          <table:table-cell office:value-type="string" calcext:value-type="string">
            <text:p>第４弾ブースターパック</text:p>
          </table:table-cell>
          <table:table-cell table:formula="of:=VLOOKUP([.G324];[$収録番号.$A$1:$収録番号.$B$9];2;0)" office:value-type="float" office:value="45" calcext:value-type="float">
            <text:p>45</text:p>
          </table:table-cell>
          <table:table-cell office:value-type="string" calcext:value-type="string">
            <text:p>R</text:p>
          </table:table-cell>
          <table:table-cell table:formula="of:=VLOOKUP([.I324];[$レアリティ番号.$A$1:$レアリティ番号.$B$4];2;0)" office:value-type="float" office:value="2" calcext:value-type="float">
            <text:p>2</text:p>
          </table:table-cell>
          <table:table-cell office:value-type="string" calcext:value-type="string">
            <text:p>イジン</text:p>
          </table:table-cell>
          <table:table-cell table:formula="of:=VLOOKUP([.K324];[$種類番号.$A$1:$種類番号.$B$4];2;0)" office:value-type="float" office:value="1" calcext:value-type="float">
            <text:p>1</text:p>
          </table:table-cell>
          <table:table-cell office:value-type="string" calcext:value-type="string">
            <text:p>赤</text:p>
          </table:table-cell>
          <table:table-cell table:formula="of:=VLOOKUP([.M324];[$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2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24];[$特性番号.$A$1:$特性番号.$B$8];2;0);0)" office:value-type="float" office:value="0" calcext:value-type="float">
            <text:p>0</text:p>
          </table:table-cell>
          <table:table-cell office:value-type="string" calcext:value-type="string">
            <text:p>自分のメインフェイズが開始したとき、自分の手札のレベル5以下の赤のイジン1体を指定して発動できる。そのイジンを戦場に置いて、これを手札に戻す。</text:p>
          </table:table-cell>
          <table:table-cell table:style-name="ce8" office:value-type="string" calcext:value-type="string">
            <text:p>反魂</text:p>
          </table:table-cell>
          <table:table-cell table:formula="of:=IFERROR(VLOOKUP([.$V324];[$遺業能力番号.$A$1:$遺業能力番号.$B$9];2;0);0)" office:value-type="float" office:value="6" calcext:value-type="float">
            <text:p>6</text:p>
          </table:table-cell>
          <table:table-cell office:value-type="string" calcext:value-type="string">
            <text:p>https://one-draw.jp/ijinden/cardlist/004/card/04_015.png</text:p>
          </table:table-cell>
          <table:table-cell table:formula="of:=CONCATENATE([$JSON.$A$1];[.$C324];[$JSON.$B$1];[.$E324];[$JSON.$C$1];[.$F324];[$JSON.$D$1];IF(ISNA([.$S324]);&quot;null&quot;;&quot;&quot;&quot;&quot;&amp;[.$S324]&amp;&quot;&quot;&quot;&quot;);[$JSON.$E$1];[.$U324];[$JSON.$F$1];IF(ISNA([.$V324]);&quot;null&quot;;&quot;&quot;&quot;&quot;&amp;[.$V324]&amp;&quot;&quot;&quot;&quot;);[$JSON.$G$1];[.$X324];[$JSON.$H$1];[.$H324];[$JSON.$I$1];[.J324];[$JSON.$J$1];[.$L324];[$JSON.$K$1];[.$O324];[$JSON.$L$1];[.$N324];[$JSON.$M$1];[.$R324];[$JSON.$N$1];[.$T324];[$JSON.$O$1];[.$W324];[$JSON.$P$1];[.$A324];[$JSON.$Q$1];[.$B324];[$JSON.$R$1])" office:value-type="string" office:string-value="{&quot;id&quot;:&quot;4-15&quot;,&quot;name&quot;:&quot;ねね&quot;,&quot;kana&quot;:&quot;ねね&quot;,&quot;traitText&quot;:null,&quot;ruleText&quot;:&quot;自分のメインフェイズが開始したとき、自分の手札のレベル5以下の赤のイジン1体を指定して発動できる。そのイジンを戦場に置いて、これを手札に戻す。&quot;,&quot;legacyText&quot;:&quot;反魂&quot;,&quot;imageUrl&quot;:&quot;https://one-draw.jp/ijinden/cardlist/004/card/04_015.png&quot;,&quot;expansion&quot;:45,&quot;rarity&quot;:2,&quot;type&quot;:1,&quot;level&quot;:2,&quot;color&quot;:1,&quot;term&quot;:0,&quot;trait&quot;:0,&quot;legacy&quot;:6,&quot;orderTable&quot;:324,&quot;orderDeck&quot;:31}," calcext:value-type="string">
            <text:p>{"id":"4-15","name":"ねね","kana":"ねね","traitText":null,"ruleText":"自分のメインフェイズが開始したとき、自分の手札のレベル5以下の赤のイジン1体を指定して発動できる。そのイジンを戦場に置いて、これを手札に戻す。","legacyText":"反魂","imageUrl":"https://one-draw.jp/ijinden/cardlist/004/card/04_015.png","expansion":45,"rarity":2,"type":1,"level":2,"color":1,"term":0,"trait":0,"legacy":6,"orderTable":324,"orderDeck":31},</text:p>
          </table:table-cell>
          <table:table-cell table:number-columns-repeated="16347"/>
        </table:table-row>
        <table:table-row table:style-name="ro2">
          <table:table-cell office:value-type="float" office:value="325" calcext:value-type="float">
            <text:p>325</text:p>
          </table:table-cell>
          <table:table-cell office:value-type="float" office:value="185" calcext:value-type="float">
            <text:p>185</text:p>
          </table:table-cell>
          <table:table-cell office:value-type="string" calcext:value-type="string">
            <text:p>4-16</text:p>
          </table:table-cell>
          <table:table-cell office:value-type="float" office:value="16" calcext:value-type="float">
            <text:p>16</text:p>
          </table:table-cell>
          <table:table-cell office:value-type="string" calcext:value-type="string">
            <text:p>源為朝</text:p>
          </table:table-cell>
          <table:table-cell office:value-type="string" calcext:value-type="string">
            <text:p>みなもとのためとも</text:p>
          </table:table-cell>
          <table:table-cell office:value-type="string" calcext:value-type="string">
            <text:p>第４弾ブースターパック</text:p>
          </table:table-cell>
          <table:table-cell table:formula="of:=VLOOKUP([.G325];[$収録番号.$A$1:$収録番号.$B$9];2;0)" office:value-type="float" office:value="45" calcext:value-type="float">
            <text:p>45</text:p>
          </table:table-cell>
          <table:table-cell office:value-type="string" calcext:value-type="string">
            <text:p>R</text:p>
          </table:table-cell>
          <table:table-cell table:formula="of:=VLOOKUP([.I325];[$レアリティ番号.$A$1:$レアリティ番号.$B$4];2;0)" office:value-type="float" office:value="2" calcext:value-type="float">
            <text:p>2</text:p>
          </table:table-cell>
          <table:table-cell office:value-type="string" calcext:value-type="string">
            <text:p>イジン</text:p>
          </table:table-cell>
          <table:table-cell table:formula="of:=VLOOKUP([.K325];[$種類番号.$A$1:$種類番号.$B$4];2;0)" office:value-type="float" office:value="1" calcext:value-type="float">
            <text:p>1</text:p>
          </table:table-cell>
          <table:table-cell office:value-type="string" calcext:value-type="string">
            <text:p>赤</text:p>
          </table:table-cell>
          <table:table-cell table:formula="of:=VLOOKUP([.M325];[$色番号.$A$1:$色番号.$B$10];2;0)" office:value-type="float" office:value="1" calcext:value-type="float">
            <text:p>1</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2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25];[$特性番号.$A$1:$特性番号.$B$8];2;0);0)" office:value-type="float" office:value="0" calcext:value-type="float">
            <text:p>0</text:p>
          </table:table-cell>
          <table:table-cell office:value-type="string" calcext:value-type="string">
            <text:p>戦場に置かれたとき、相手の戦場のパワー6000以下のイジン1体を指定して発動できる。そのイジンを破壊して、相手の戦場の起きているイジン1体を破壊する。¶アタック+2000</text:p>
          </table:table-cell>
          <table:table-cell table:style-name="ce8" table:formula="of:=NA()" office:value-type="string" office:string-value="" calcext:value-type="error">
            <text:p>#N/A</text:p>
          </table:table-cell>
          <table:table-cell table:formula="of:=IFERROR(VLOOKUP([.$V325];[$遺業能力番号.$A$1:$遺業能力番号.$B$9];2;0);0)" office:value-type="float" office:value="0" calcext:value-type="float">
            <text:p>0</text:p>
          </table:table-cell>
          <table:table-cell office:value-type="string" calcext:value-type="string">
            <text:p>https://one-draw.jp/ijinden/cardlist/004/card/04_016.png</text:p>
          </table:table-cell>
          <table:table-cell table:formula="of:=CONCATENATE([$JSON.$A$1];[.$C325];[$JSON.$B$1];[.$E325];[$JSON.$C$1];[.$F325];[$JSON.$D$1];IF(ISNA([.$S325]);&quot;null&quot;;&quot;&quot;&quot;&quot;&amp;[.$S325]&amp;&quot;&quot;&quot;&quot;);[$JSON.$E$1];[.$U325];[$JSON.$F$1];IF(ISNA([.$V325]);&quot;null&quot;;&quot;&quot;&quot;&quot;&amp;[.$V325]&amp;&quot;&quot;&quot;&quot;);[$JSON.$G$1];[.$X325];[$JSON.$H$1];[.$H325];[$JSON.$I$1];[.J325];[$JSON.$J$1];[.$L325];[$JSON.$K$1];[.$O325];[$JSON.$L$1];[.$N325];[$JSON.$M$1];[.$R325];[$JSON.$N$1];[.$T325];[$JSON.$O$1];[.$W325];[$JSON.$P$1];[.$A325];[$JSON.$Q$1];[.$B325];[$JSON.$R$1])" office:value-type="string" office:string-value="{&quot;id&quot;:&quot;4-16&quot;,&quot;name&quot;:&quot;源為朝&quot;,&quot;kana&quot;:&quot;みなもとのためとも&quot;,&quot;traitText&quot;:null,&quot;ruleText&quot;:&quot;戦場に置かれたとき、相手の戦場のパワー6000以下のイジン1体を指定して発動できる。そのイジンを破壊して、相手の戦場の起きているイジン1体を破壊する。¶アタック+2000&quot;,&quot;legacyText&quot;:null,&quot;imageUrl&quot;:&quot;https://one-draw.jp/ijinden/cardlist/004/card/04_016.png&quot;,&quot;expansion&quot;:45,&quot;rarity&quot;:2,&quot;type&quot;:1,&quot;level&quot;:6,&quot;color&quot;:1,&quot;term&quot;:0,&quot;trait&quot;:0,&quot;legacy&quot;:0,&quot;orderTable&quot;:325,&quot;orderDeck&quot;:185}," calcext:value-type="string">
            <text:p>{"id":"4-16","name":"源為朝","kana":"みなもとのためとも","traitText":null,"ruleText":"戦場に置かれたとき、相手の戦場のパワー6000以下のイジン1体を指定して発動できる。そのイジンを破壊して、相手の戦場の起きているイジン1体を破壊する。¶アタック+2000","legacyText":null,"imageUrl":"https://one-draw.jp/ijinden/cardlist/004/card/04_016.png","expansion":45,"rarity":2,"type":1,"level":6,"color":1,"term":0,"trait":0,"legacy":0,"orderTable":325,"orderDeck":185},</text:p>
          </table:table-cell>
          <table:table-cell table:number-columns-repeated="16347"/>
        </table:table-row>
        <table:table-row table:style-name="ro2">
          <table:table-cell office:value-type="float" office:value="326" calcext:value-type="float">
            <text:p>326</text:p>
          </table:table-cell>
          <table:table-cell office:value-type="float" office:value="82" calcext:value-type="float">
            <text:p>82</text:p>
          </table:table-cell>
          <table:table-cell office:value-type="string" calcext:value-type="string">
            <text:p>4-17</text:p>
          </table:table-cell>
          <table:table-cell office:value-type="float" office:value="17" calcext:value-type="float">
            <text:p>17</text:p>
          </table:table-cell>
          <table:table-cell office:value-type="string" calcext:value-type="string">
            <text:p>久坂玄瑞</text:p>
          </table:table-cell>
          <table:table-cell office:value-type="string" calcext:value-type="string">
            <text:p>くさかげんすい</text:p>
          </table:table-cell>
          <table:table-cell office:value-type="string" calcext:value-type="string">
            <text:p>第４弾ブースターパック</text:p>
          </table:table-cell>
          <table:table-cell table:formula="of:=VLOOKUP([.G326];[$収録番号.$A$1:$収録番号.$B$9];2;0)" office:value-type="float" office:value="45" calcext:value-type="float">
            <text:p>45</text:p>
          </table:table-cell>
          <table:table-cell office:value-type="string" calcext:value-type="string">
            <text:p>R</text:p>
          </table:table-cell>
          <table:table-cell table:formula="of:=VLOOKUP([.I326];[$レアリティ番号.$A$1:$レアリティ番号.$B$4];2;0)" office:value-type="float" office:value="2" calcext:value-type="float">
            <text:p>2</text:p>
          </table:table-cell>
          <table:table-cell office:value-type="string" calcext:value-type="string">
            <text:p>イジン</text:p>
          </table:table-cell>
          <table:table-cell table:formula="of:=VLOOKUP([.K326];[$種類番号.$A$1:$種類番号.$B$4];2;0)" office:value-type="float" office:value="1" calcext:value-type="float">
            <text:p>1</text:p>
          </table:table-cell>
          <table:table-cell office:value-type="string" calcext:value-type="string">
            <text:p>青</text:p>
          </table:table-cell>
          <table:table-cell table:formula="of:=VLOOKUP([.M326];[$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26];[$能力語番号.$A$1:$能力語番号.$B$10];2;0);0)" office:value-type="float" office:value="0" calcext:value-type="float">
            <text:p>0</text:p>
          </table:table-cell>
          <table:table-cell office:value-type="string" calcext:value-type="string">
            <text:p>思想</text:p>
          </table:table-cell>
          <table:table-cell table:formula="of:=IFERROR(VLOOKUP([.$S326];[$特性番号.$A$1:$特性番号.$B$8];2;0);0)" office:value-type="float" office:value="8" calcext:value-type="float">
            <text:p>8</text:p>
          </table:table-cell>
          <table:table-cell office:value-type="string" calcext:value-type="string">
            <text:p>赤か紫のカードが戦場にある間「即応」を得る。¶緑か黄のカードが戦場にある間「ウォッチャー」を得る。</text:p>
          </table:table-cell>
          <table:table-cell table:style-name="ce8" office:value-type="string" calcext:value-type="string">
            <text:p>喪神</text:p>
          </table:table-cell>
          <table:table-cell table:formula="of:=IFERROR(VLOOKUP([.$V326];[$遺業能力番号.$A$1:$遺業能力番号.$B$9];2;0);0)" office:value-type="float" office:value="9" calcext:value-type="float">
            <text:p>9</text:p>
          </table:table-cell>
          <table:table-cell office:value-type="string" calcext:value-type="string">
            <text:p>https://one-draw.jp/ijinden/cardlist/004/card/04_017.png</text:p>
          </table:table-cell>
          <table:table-cell table:formula="of:=CONCATENATE([$JSON.$A$1];[.$C326];[$JSON.$B$1];[.$E326];[$JSON.$C$1];[.$F326];[$JSON.$D$1];IF(ISNA([.$S326]);&quot;null&quot;;&quot;&quot;&quot;&quot;&amp;[.$S326]&amp;&quot;&quot;&quot;&quot;);[$JSON.$E$1];[.$U326];[$JSON.$F$1];IF(ISNA([.$V326]);&quot;null&quot;;&quot;&quot;&quot;&quot;&amp;[.$V326]&amp;&quot;&quot;&quot;&quot;);[$JSON.$G$1];[.$X326];[$JSON.$H$1];[.$H326];[$JSON.$I$1];[.J326];[$JSON.$J$1];[.$L326];[$JSON.$K$1];[.$O326];[$JSON.$L$1];[.$N326];[$JSON.$M$1];[.$R326];[$JSON.$N$1];[.$T326];[$JSON.$O$1];[.$W326];[$JSON.$P$1];[.$A326];[$JSON.$Q$1];[.$B326];[$JSON.$R$1])" office:value-type="string" office:string-value="{&quot;id&quot;:&quot;4-17&quot;,&quot;name&quot;:&quot;久坂玄瑞&quot;,&quot;kana&quot;:&quot;くさかげんすい&quot;,&quot;traitText&quot;:&quot;思想&quot;,&quot;ruleText&quot;:&quot;赤か紫のカードが戦場にある間「即応」を得る。¶緑か黄のカードが戦場にある間「ウォッチャー」を得る。&quot;,&quot;legacyText&quot;:&quot;喪神&quot;,&quot;imageUrl&quot;:&quot;https://one-draw.jp/ijinden/cardlist/004/card/04_017.png&quot;,&quot;expansion&quot;:45,&quot;rarity&quot;:2,&quot;type&quot;:1,&quot;level&quot;:3,&quot;color&quot;:2,&quot;term&quot;:0,&quot;trait&quot;:8,&quot;legacy&quot;:9,&quot;orderTable&quot;:326,&quot;orderDeck&quot;:82}," calcext:value-type="string">
            <text:p>{"id":"4-17","name":"久坂玄瑞","kana":"くさかげんすい","traitText":"思想","ruleText":"赤か紫のカードが戦場にある間「即応」を得る。¶緑か黄のカードが戦場にある間「ウォッチャー」を得る。","legacyText":"喪神","imageUrl":"https://one-draw.jp/ijinden/cardlist/004/card/04_017.png","expansion":45,"rarity":2,"type":1,"level":3,"color":2,"term":0,"trait":8,"legacy":9,"orderTable":326,"orderDeck":82},</text:p>
          </table:table-cell>
          <table:table-cell table:number-columns-repeated="16347"/>
        </table:table-row>
        <table:table-row table:style-name="ro2">
          <table:table-cell office:value-type="float" office:value="327" calcext:value-type="float">
            <text:p>327</text:p>
          </table:table-cell>
          <table:table-cell office:value-type="float" office:value="162" calcext:value-type="float">
            <text:p>162</text:p>
          </table:table-cell>
          <table:table-cell office:value-type="string" calcext:value-type="string">
            <text:p>4-18</text:p>
          </table:table-cell>
          <table:table-cell office:value-type="float" office:value="18" calcext:value-type="float">
            <text:p>18</text:p>
          </table:table-cell>
          <table:table-cell office:value-type="string" calcext:value-type="string">
            <text:p>ポンパドゥール夫人</text:p>
          </table:table-cell>
          <table:table-cell office:value-type="string" calcext:value-type="string">
            <text:p>ぽんぱどぅーるふじん</text:p>
          </table:table-cell>
          <table:table-cell office:value-type="string" calcext:value-type="string">
            <text:p>第４弾ブースターパック</text:p>
          </table:table-cell>
          <table:table-cell table:formula="of:=VLOOKUP([.G327];[$収録番号.$A$1:$収録番号.$B$9];2;0)" office:value-type="float" office:value="45" calcext:value-type="float">
            <text:p>45</text:p>
          </table:table-cell>
          <table:table-cell office:value-type="string" calcext:value-type="string">
            <text:p>N</text:p>
          </table:table-cell>
          <table:table-cell table:formula="of:=VLOOKUP([.I327];[$レアリティ番号.$A$1:$レアリティ番号.$B$4];2;0)" office:value-type="float" office:value="1" calcext:value-type="float">
            <text:p>1</text:p>
          </table:table-cell>
          <table:table-cell office:value-type="string" calcext:value-type="string">
            <text:p>イジン</text:p>
          </table:table-cell>
          <table:table-cell table:formula="of:=VLOOKUP([.K327];[$種類番号.$A$1:$種類番号.$B$4];2;0)" office:value-type="float" office:value="1" calcext:value-type="float">
            <text:p>1</text:p>
          </table:table-cell>
          <table:table-cell office:value-type="string" calcext:value-type="string">
            <text:p>青</text:p>
          </table:table-cell>
          <table:table-cell table:formula="of:=VLOOKUP([.M327];[$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2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27];[$特性番号.$A$1:$特性番号.$B$8];2;0);0)" office:value-type="float" office:value="0" calcext:value-type="float">
            <text:p>0</text:p>
          </table:table-cell>
          <table:table-cell office:value-type="string" calcext:value-type="string">
            <text:p>戦場に置かれたとき「思想」カードが自分の戦場か自分の墓地にあるなら、自分の手札のカード1つを指定して発動できる。そのカードを裏向きで戦場に置く。</text:p>
          </table:table-cell>
          <table:table-cell table:style-name="ce8" office:value-type="string" calcext:value-type="string">
            <text:p>木霊</text:p>
          </table:table-cell>
          <table:table-cell table:formula="of:=IFERROR(VLOOKUP([.$V327];[$遺業能力番号.$A$1:$遺業能力番号.$B$9];2;0);0)" office:value-type="float" office:value="8" calcext:value-type="float">
            <text:p>8</text:p>
          </table:table-cell>
          <table:table-cell office:value-type="string" calcext:value-type="string">
            <text:p>https://one-draw.jp/ijinden/cardlist/004/card/04_018.png</text:p>
          </table:table-cell>
          <table:table-cell table:formula="of:=CONCATENATE([$JSON.$A$1];[.$C327];[$JSON.$B$1];[.$E327];[$JSON.$C$1];[.$F327];[$JSON.$D$1];IF(ISNA([.$S327]);&quot;null&quot;;&quot;&quot;&quot;&quot;&amp;[.$S327]&amp;&quot;&quot;&quot;&quot;);[$JSON.$E$1];[.$U327];[$JSON.$F$1];IF(ISNA([.$V327]);&quot;null&quot;;&quot;&quot;&quot;&quot;&amp;[.$V327]&amp;&quot;&quot;&quot;&quot;);[$JSON.$G$1];[.$X327];[$JSON.$H$1];[.$H327];[$JSON.$I$1];[.J327];[$JSON.$J$1];[.$L327];[$JSON.$K$1];[.$O327];[$JSON.$L$1];[.$N327];[$JSON.$M$1];[.$R327];[$JSON.$N$1];[.$T327];[$JSON.$O$1];[.$W327];[$JSON.$P$1];[.$A327];[$JSON.$Q$1];[.$B327];[$JSON.$R$1])" office:value-type="string" office:string-value="{&quot;id&quot;:&quot;4-18&quot;,&quot;name&quot;:&quot;ポンパドゥール夫人&quot;,&quot;kana&quot;:&quot;ぽんぱどぅーるふじん&quot;,&quot;traitText&quot;:null,&quot;ruleText&quot;:&quot;戦場に置かれたとき「思想」カードが自分の戦場か自分の墓地にあるなら、自分の手札のカード1つを指定して発動できる。そのカードを裏向きで戦場に置く。&quot;,&quot;legacyText&quot;:&quot;木霊&quot;,&quot;imageUrl&quot;:&quot;https://one-draw.jp/ijinden/cardlist/004/card/04_018.png&quot;,&quot;expansion&quot;:45,&quot;rarity&quot;:1,&quot;type&quot;:1,&quot;level&quot;:5,&quot;color&quot;:2,&quot;term&quot;:0,&quot;trait&quot;:0,&quot;legacy&quot;:8,&quot;orderTable&quot;:327,&quot;orderDeck&quot;:162}," calcext:value-type="string">
            <text:p>{"id":"4-18","name":"ポンパドゥール夫人","kana":"ぽんぱどぅーるふじん","traitText":null,"ruleText":"戦場に置かれたとき「思想」カードが自分の戦場か自分の墓地にあるなら、自分の手札のカード1つを指定して発動できる。そのカードを裏向きで戦場に置く。","legacyText":"木霊","imageUrl":"https://one-draw.jp/ijinden/cardlist/004/card/04_018.png","expansion":45,"rarity":1,"type":1,"level":5,"color":2,"term":0,"trait":0,"legacy":8,"orderTable":327,"orderDeck":162},</text:p>
          </table:table-cell>
          <table:table-cell table:number-columns-repeated="16347"/>
        </table:table-row>
        <table:table-row table:style-name="ro2">
          <table:table-cell office:value-type="float" office:value="328" calcext:value-type="float">
            <text:p>328</text:p>
          </table:table-cell>
          <table:table-cell office:value-type="float" office:value="42" calcext:value-type="float">
            <text:p>42</text:p>
          </table:table-cell>
          <table:table-cell office:value-type="string" calcext:value-type="string">
            <text:p>4-19</text:p>
          </table:table-cell>
          <table:table-cell office:value-type="float" office:value="19" calcext:value-type="float">
            <text:p>19</text:p>
          </table:table-cell>
          <table:table-cell office:value-type="string" calcext:value-type="string">
            <text:p>エドモンド・カートライト</text:p>
          </table:table-cell>
          <table:table-cell office:value-type="string" calcext:value-type="string">
            <text:p>えどもんどかーとらいと</text:p>
          </table:table-cell>
          <table:table-cell office:value-type="string" calcext:value-type="string">
            <text:p>第４弾ブースターパック</text:p>
          </table:table-cell>
          <table:table-cell table:formula="of:=VLOOKUP([.G328];[$収録番号.$A$1:$収録番号.$B$9];2;0)" office:value-type="float" office:value="45" calcext:value-type="float">
            <text:p>45</text:p>
          </table:table-cell>
          <table:table-cell office:value-type="string" calcext:value-type="string">
            <text:p>N</text:p>
          </table:table-cell>
          <table:table-cell table:formula="of:=VLOOKUP([.I328];[$レアリティ番号.$A$1:$レアリティ番号.$B$4];2;0)" office:value-type="float" office:value="1" calcext:value-type="float">
            <text:p>1</text:p>
          </table:table-cell>
          <table:table-cell office:value-type="string" calcext:value-type="string">
            <text:p>イジン</text:p>
          </table:table-cell>
          <table:table-cell table:formula="of:=VLOOKUP([.K328];[$種類番号.$A$1:$種類番号.$B$4];2;0)" office:value-type="float" office:value="1" calcext:value-type="float">
            <text:p>1</text:p>
          </table:table-cell>
          <table:table-cell office:value-type="string" calcext:value-type="string">
            <text:p>青</text:p>
          </table:table-cell>
          <table:table-cell table:formula="of:=VLOOKUP([.M328];[$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2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28];[$特性番号.$A$1:$特性番号.$B$8];2;0);0)" office:value-type="float" office:value="0" calcext:value-type="float">
            <text:p>0</text:p>
          </table:table-cell>
          <table:table-cell office:value-type="string" calcext:value-type="string">
            <text:p>イジンが戦場に置かれたとき、装備されているカード1つを指定して発動できる。そのカードを手札に戻して、1ドローする。¶ブロック+2000</text:p>
          </table:table-cell>
          <table:table-cell table:style-name="ce8" office:value-type="string" calcext:value-type="string">
            <text:p>1ドローする</text:p>
          </table:table-cell>
          <table:table-cell table:formula="of:=IFERROR(VLOOKUP([.$V328];[$遺業能力番号.$A$1:$遺業能力番号.$B$9];2;0);0)" office:value-type="float" office:value="4" calcext:value-type="float">
            <text:p>4</text:p>
          </table:table-cell>
          <table:table-cell office:value-type="string" calcext:value-type="string">
            <text:p>https://one-draw.jp/ijinden/cardlist/004/card/04_019.png</text:p>
          </table:table-cell>
          <table:table-cell table:formula="of:=CONCATENATE([$JSON.$A$1];[.$C328];[$JSON.$B$1];[.$E328];[$JSON.$C$1];[.$F328];[$JSON.$D$1];IF(ISNA([.$S328]);&quot;null&quot;;&quot;&quot;&quot;&quot;&amp;[.$S328]&amp;&quot;&quot;&quot;&quot;);[$JSON.$E$1];[.$U328];[$JSON.$F$1];IF(ISNA([.$V328]);&quot;null&quot;;&quot;&quot;&quot;&quot;&amp;[.$V328]&amp;&quot;&quot;&quot;&quot;);[$JSON.$G$1];[.$X328];[$JSON.$H$1];[.$H328];[$JSON.$I$1];[.J328];[$JSON.$J$1];[.$L328];[$JSON.$K$1];[.$O328];[$JSON.$L$1];[.$N328];[$JSON.$M$1];[.$R328];[$JSON.$N$1];[.$T328];[$JSON.$O$1];[.$W328];[$JSON.$P$1];[.$A328];[$JSON.$Q$1];[.$B328];[$JSON.$R$1])" office:value-type="string" office:string-value="{&quot;id&quot;:&quot;4-19&quot;,&quot;name&quot;:&quot;エドモンド・カートライト&quot;,&quot;kana&quot;:&quot;えどもんどかーとらいと&quot;,&quot;traitText&quot;:null,&quot;ruleText&quot;:&quot;イジンが戦場に置かれたとき、装備されているカード1つを指定して発動できる。そのカードを手札に戻して、1ドローする。¶ブロック+2000&quot;,&quot;legacyText&quot;:&quot;1ドローする&quot;,&quot;imageUrl&quot;:&quot;https://one-draw.jp/ijinden/cardlist/004/card/04_019.png&quot;,&quot;expansion&quot;:45,&quot;rarity&quot;:1,&quot;type&quot;:1,&quot;level&quot;:2,&quot;color&quot;:2,&quot;term&quot;:0,&quot;trait&quot;:0,&quot;legacy&quot;:4,&quot;orderTable&quot;:328,&quot;orderDeck&quot;:42}," calcext:value-type="string">
            <text:p>{"id":"4-19","name":"エドモンド・カートライト","kana":"えどもんどかーとらいと","traitText":null,"ruleText":"イジンが戦場に置かれたとき、装備されているカード1つを指定して発動できる。そのカードを手札に戻して、1ドローする。¶ブロック+2000","legacyText":"1ドローする","imageUrl":"https://one-draw.jp/ijinden/cardlist/004/card/04_019.png","expansion":45,"rarity":1,"type":1,"level":2,"color":2,"term":0,"trait":0,"legacy":4,"orderTable":328,"orderDeck":42},</text:p>
          </table:table-cell>
          <table:table-cell table:number-columns-repeated="16347"/>
        </table:table-row>
        <table:table-row table:style-name="ro2">
          <table:table-cell office:value-type="float" office:value="329" calcext:value-type="float">
            <text:p>329</text:p>
          </table:table-cell>
          <table:table-cell office:value-type="float" office:value="43" calcext:value-type="float">
            <text:p>43</text:p>
          </table:table-cell>
          <table:table-cell office:value-type="string" calcext:value-type="string">
            <text:p>4-20</text:p>
          </table:table-cell>
          <table:table-cell office:value-type="float" office:value="20" calcext:value-type="float">
            <text:p>20</text:p>
          </table:table-cell>
          <table:table-cell office:value-type="string" calcext:value-type="string">
            <text:p>クロード・アシル・ドビュッシー</text:p>
          </table:table-cell>
          <table:table-cell office:value-type="string" calcext:value-type="string">
            <text:p>くろーどあしるどびゅっしー</text:p>
          </table:table-cell>
          <table:table-cell office:value-type="string" calcext:value-type="string">
            <text:p>第４弾ブースターパック</text:p>
          </table:table-cell>
          <table:table-cell table:formula="of:=VLOOKUP([.G329];[$収録番号.$A$1:$収録番号.$B$9];2;0)" office:value-type="float" office:value="45" calcext:value-type="float">
            <text:p>45</text:p>
          </table:table-cell>
          <table:table-cell office:value-type="string" calcext:value-type="string">
            <text:p>N</text:p>
          </table:table-cell>
          <table:table-cell table:formula="of:=VLOOKUP([.I329];[$レアリティ番号.$A$1:$レアリティ番号.$B$4];2;0)" office:value-type="float" office:value="1" calcext:value-type="float">
            <text:p>1</text:p>
          </table:table-cell>
          <table:table-cell office:value-type="string" calcext:value-type="string">
            <text:p>イジン</text:p>
          </table:table-cell>
          <table:table-cell table:formula="of:=VLOOKUP([.K329];[$種類番号.$A$1:$種類番号.$B$4];2;0)" office:value-type="float" office:value="1" calcext:value-type="float">
            <text:p>1</text:p>
          </table:table-cell>
          <table:table-cell office:value-type="string" calcext:value-type="string">
            <text:p>青</text:p>
          </table:table-cell>
          <table:table-cell table:formula="of:=VLOOKUP([.M329];[$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29];[$能力語番号.$A$1:$能力語番号.$B$10];2;0);0)" office:value-type="float" office:value="0" calcext:value-type="float">
            <text:p>0</text:p>
          </table:table-cell>
          <table:table-cell office:value-type="string" calcext:value-type="string">
            <text:p>音楽</text:p>
          </table:table-cell>
          <table:table-cell table:formula="of:=IFERROR(VLOOKUP([.$S329];[$特性番号.$A$1:$特性番号.$B$8];2;0);0)" office:value-type="float" office:value="4" calcext:value-type="float">
            <text:p>4</text:p>
          </table:table-cell>
          <table:table-cell office:value-type="string" calcext:value-type="string">
            <text:p>戦場に置かれたとき、自分の戦場のイジン1体かガーディアン1体を寝かせる。¶これが戦場にいる間、戦場のレベル3以下の赤のイジンは能力すべてを失う。この能力は能力によって失われない。</text:p>
          </table:table-cell>
          <table:table-cell table:style-name="ce8" office:value-type="string" calcext:value-type="string">
            <text:p>1ドローする</text:p>
          </table:table-cell>
          <table:table-cell table:formula="of:=IFERROR(VLOOKUP([.$V329];[$遺業能力番号.$A$1:$遺業能力番号.$B$9];2;0);0)" office:value-type="float" office:value="4" calcext:value-type="float">
            <text:p>4</text:p>
          </table:table-cell>
          <table:table-cell office:value-type="string" calcext:value-type="string">
            <text:p>https://one-draw.jp/ijinden/cardlist/004/card/04_020.png</text:p>
          </table:table-cell>
          <table:table-cell table:formula="of:=CONCATENATE([$JSON.$A$1];[.$C329];[$JSON.$B$1];[.$E329];[$JSON.$C$1];[.$F329];[$JSON.$D$1];IF(ISNA([.$S329]);&quot;null&quot;;&quot;&quot;&quot;&quot;&amp;[.$S329]&amp;&quot;&quot;&quot;&quot;);[$JSON.$E$1];[.$U329];[$JSON.$F$1];IF(ISNA([.$V329]);&quot;null&quot;;&quot;&quot;&quot;&quot;&amp;[.$V329]&amp;&quot;&quot;&quot;&quot;);[$JSON.$G$1];[.$X329];[$JSON.$H$1];[.$H329];[$JSON.$I$1];[.J329];[$JSON.$J$1];[.$L329];[$JSON.$K$1];[.$O329];[$JSON.$L$1];[.$N329];[$JSON.$M$1];[.$R329];[$JSON.$N$1];[.$T329];[$JSON.$O$1];[.$W329];[$JSON.$P$1];[.$A329];[$JSON.$Q$1];[.$B329];[$JSON.$R$1])" office:value-type="string" office:string-value="{&quot;id&quot;:&quot;4-20&quot;,&quot;name&quot;:&quot;クロード・アシル・ドビュッシー&quot;,&quot;kana&quot;:&quot;くろーどあしるどびゅっしー&quot;,&quot;traitText&quot;:&quot;音楽&quot;,&quot;ruleText&quot;:&quot;戦場に置かれたとき、自分の戦場のイジン1体かガーディアン1体を寝かせる。¶これが戦場にいる間、戦場のレベル3以下の赤のイジンは能力すべてを失う。この能力は能力によって失われない。&quot;,&quot;legacyText&quot;:&quot;1ドローする&quot;,&quot;imageUrl&quot;:&quot;https://one-draw.jp/ijinden/cardlist/004/card/04_020.png&quot;,&quot;expansion&quot;:45,&quot;rarity&quot;:1,&quot;type&quot;:1,&quot;level&quot;:2,&quot;color&quot;:2,&quot;term&quot;:0,&quot;trait&quot;:4,&quot;legacy&quot;:4,&quot;orderTable&quot;:329,&quot;orderDeck&quot;:43}," calcext:value-type="string">
            <text:p>{"id":"4-20","name":"クロード・アシル・ドビュッシー","kana":"くろーどあしるどびゅっしー","traitText":"音楽","ruleText":"戦場に置かれたとき、自分の戦場のイジン1体かガーディアン1体を寝かせる。¶これが戦場にいる間、戦場のレベル3以下の赤のイジンは能力すべてを失う。この能力は能力によって失われない。","legacyText":"1ドローする","imageUrl":"https://one-draw.jp/ijinden/cardlist/004/card/04_020.png","expansion":45,"rarity":1,"type":1,"level":2,"color":2,"term":0,"trait":4,"legacy":4,"orderTable":329,"orderDeck":43},</text:p>
          </table:table-cell>
          <table:table-cell table:number-columns-repeated="16347"/>
        </table:table-row>
        <table:table-row table:style-name="ro2">
          <table:table-cell office:value-type="float" office:value="330" calcext:value-type="float">
            <text:p>330</text:p>
          </table:table-cell>
          <table:table-cell office:value-type="float" office:value="11" calcext:value-type="float">
            <text:p>11</text:p>
          </table:table-cell>
          <table:table-cell office:value-type="string" calcext:value-type="string">
            <text:p>4-21</text:p>
          </table:table-cell>
          <table:table-cell office:value-type="float" office:value="21" calcext:value-type="float">
            <text:p>21</text:p>
          </table:table-cell>
          <table:table-cell office:value-type="string" calcext:value-type="string">
            <text:p>フレデリック・フランソワ・ショパン</text:p>
          </table:table-cell>
          <table:table-cell office:value-type="string" calcext:value-type="string">
            <text:p>ふれでりっくふらんそわしょぱん</text:p>
          </table:table-cell>
          <table:table-cell office:value-type="string" calcext:value-type="string">
            <text:p>第４弾ブースターパック</text:p>
          </table:table-cell>
          <table:table-cell table:formula="of:=VLOOKUP([.G330];[$収録番号.$A$1:$収録番号.$B$9];2;0)" office:value-type="float" office:value="45" calcext:value-type="float">
            <text:p>45</text:p>
          </table:table-cell>
          <table:table-cell office:value-type="string" calcext:value-type="string">
            <text:p>N</text:p>
          </table:table-cell>
          <table:table-cell table:formula="of:=VLOOKUP([.I330];[$レアリティ番号.$A$1:$レアリティ番号.$B$4];2;0)" office:value-type="float" office:value="1" calcext:value-type="float">
            <text:p>1</text:p>
          </table:table-cell>
          <table:table-cell office:value-type="string" calcext:value-type="string">
            <text:p>イジン</text:p>
          </table:table-cell>
          <table:table-cell table:formula="of:=VLOOKUP([.K330];[$種類番号.$A$1:$種類番号.$B$4];2;0)" office:value-type="float" office:value="1" calcext:value-type="float">
            <text:p>1</text:p>
          </table:table-cell>
          <table:table-cell office:value-type="string" calcext:value-type="string">
            <text:p>青</text:p>
          </table:table-cell>
          <table:table-cell table:formula="of:=VLOOKUP([.M330];[$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30];[$能力語番号.$A$1:$能力語番号.$B$10];2;0);0)" office:value-type="float" office:value="0" calcext:value-type="float">
            <text:p>0</text:p>
          </table:table-cell>
          <table:table-cell office:value-type="string" calcext:value-type="string">
            <text:p>音楽</text:p>
          </table:table-cell>
          <table:table-cell table:formula="of:=IFERROR(VLOOKUP([.$S330];[$特性番号.$A$1:$特性番号.$B$8];2;0);0)" office:value-type="float" office:value="4" calcext:value-type="float">
            <text:p>4</text:p>
          </table:table-cell>
          <table:table-cell office:value-type="string" calcext:value-type="string">
            <text:p>戦場に置かれたとき、自分の戦場のイジン1体かガーディアン1体を寝かせる。¶ブロック+2000</text:p>
          </table:table-cell>
          <table:table-cell table:style-name="ce8" office:value-type="string" calcext:value-type="string">
            <text:p>1ドローする</text:p>
          </table:table-cell>
          <table:table-cell table:formula="of:=IFERROR(VLOOKUP([.$V330];[$遺業能力番号.$A$1:$遺業能力番号.$B$9];2;0);0)" office:value-type="float" office:value="4" calcext:value-type="float">
            <text:p>4</text:p>
          </table:table-cell>
          <table:table-cell office:value-type="string" calcext:value-type="string">
            <text:p>https://one-draw.jp/ijinden/cardlist/004/card/04_021.png</text:p>
          </table:table-cell>
          <table:table-cell table:formula="of:=CONCATENATE([$JSON.$A$1];[.$C330];[$JSON.$B$1];[.$E330];[$JSON.$C$1];[.$F330];[$JSON.$D$1];IF(ISNA([.$S330]);&quot;null&quot;;&quot;&quot;&quot;&quot;&amp;[.$S330]&amp;&quot;&quot;&quot;&quot;);[$JSON.$E$1];[.$U330];[$JSON.$F$1];IF(ISNA([.$V330]);&quot;null&quot;;&quot;&quot;&quot;&quot;&amp;[.$V330]&amp;&quot;&quot;&quot;&quot;);[$JSON.$G$1];[.$X330];[$JSON.$H$1];[.$H330];[$JSON.$I$1];[.J330];[$JSON.$J$1];[.$L330];[$JSON.$K$1];[.$O330];[$JSON.$L$1];[.$N330];[$JSON.$M$1];[.$R330];[$JSON.$N$1];[.$T330];[$JSON.$O$1];[.$W330];[$JSON.$P$1];[.$A330];[$JSON.$Q$1];[.$B330];[$JSON.$R$1])" office:value-type="string" office:string-value="{&quot;id&quot;:&quot;4-21&quot;,&quot;name&quot;:&quot;フレデリック・フランソワ・ショパン&quot;,&quot;kana&quot;:&quot;ふれでりっくふらんそわしょぱん&quot;,&quot;traitText&quot;:&quot;音楽&quot;,&quot;ruleText&quot;:&quot;戦場に置かれたとき、自分の戦場のイジン1体かガーディアン1体を寝かせる。¶ブロック+2000&quot;,&quot;legacyText&quot;:&quot;1ドローする&quot;,&quot;imageUrl&quot;:&quot;https://one-draw.jp/ijinden/cardlist/004/card/04_021.png&quot;,&quot;expansion&quot;:45,&quot;rarity&quot;:1,&quot;type&quot;:1,&quot;level&quot;:1,&quot;color&quot;:2,&quot;term&quot;:0,&quot;trait&quot;:4,&quot;legacy&quot;:4,&quot;orderTable&quot;:330,&quot;orderDeck&quot;:11}," calcext:value-type="string">
            <text:p>{"id":"4-21","name":"フレデリック・フランソワ・ショパン","kana":"ふれでりっくふらんそわしょぱん","traitText":"音楽","ruleText":"戦場に置かれたとき、自分の戦場のイジン1体かガーディアン1体を寝かせる。¶ブロック+2000","legacyText":"1ドローする","imageUrl":"https://one-draw.jp/ijinden/cardlist/004/card/04_021.png","expansion":45,"rarity":1,"type":1,"level":1,"color":2,"term":0,"trait":4,"legacy":4,"orderTable":330,"orderDeck":11},</text:p>
          </table:table-cell>
          <table:table-cell table:number-columns-repeated="16347"/>
        </table:table-row>
        <table:table-row table:style-name="ro2">
          <table:table-cell office:value-type="float" office:value="331" calcext:value-type="float">
            <text:p>331</text:p>
          </table:table-cell>
          <table:table-cell office:value-type="float" office:value="83" calcext:value-type="float">
            <text:p>83</text:p>
          </table:table-cell>
          <table:table-cell office:value-type="string" calcext:value-type="string">
            <text:p>4-22</text:p>
          </table:table-cell>
          <table:table-cell office:value-type="float" office:value="22" calcext:value-type="float">
            <text:p>22</text:p>
          </table:table-cell>
          <table:table-cell office:value-type="string" calcext:value-type="string">
            <text:p>ピョートル・イリイチ・チャイコフスキー</text:p>
          </table:table-cell>
          <table:table-cell office:value-type="string" calcext:value-type="string">
            <text:p>ぴょーとるいりいちちゃいこふすきー</text:p>
          </table:table-cell>
          <table:table-cell office:value-type="string" calcext:value-type="string">
            <text:p>第４弾ブースターパック</text:p>
          </table:table-cell>
          <table:table-cell table:formula="of:=VLOOKUP([.G331];[$収録番号.$A$1:$収録番号.$B$9];2;0)" office:value-type="float" office:value="45" calcext:value-type="float">
            <text:p>45</text:p>
          </table:table-cell>
          <table:table-cell office:value-type="string" calcext:value-type="string">
            <text:p>R</text:p>
          </table:table-cell>
          <table:table-cell table:formula="of:=VLOOKUP([.I331];[$レアリティ番号.$A$1:$レアリティ番号.$B$4];2;0)" office:value-type="float" office:value="2" calcext:value-type="float">
            <text:p>2</text:p>
          </table:table-cell>
          <table:table-cell office:value-type="string" calcext:value-type="string">
            <text:p>イジン</text:p>
          </table:table-cell>
          <table:table-cell table:formula="of:=VLOOKUP([.K331];[$種類番号.$A$1:$種類番号.$B$4];2;0)" office:value-type="float" office:value="1" calcext:value-type="float">
            <text:p>1</text:p>
          </table:table-cell>
          <table:table-cell office:value-type="string" calcext:value-type="string">
            <text:p>青</text:p>
          </table:table-cell>
          <table:table-cell table:formula="of:=VLOOKUP([.M331];[$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31];[$能力語番号.$A$1:$能力語番号.$B$10];2;0);0)" office:value-type="float" office:value="0" calcext:value-type="float">
            <text:p>0</text:p>
          </table:table-cell>
          <table:table-cell office:value-type="string" calcext:value-type="string">
            <text:p>音楽</text:p>
          </table:table-cell>
          <table:table-cell table:formula="of:=IFERROR(VLOOKUP([.$S331];[$特性番号.$A$1:$特性番号.$B$8];2;0);0)" office:value-type="float" office:value="4" calcext:value-type="float">
            <text:p>4</text:p>
          </table:table-cell>
          <table:table-cell office:value-type="string" calcext:value-type="string">
            <text:p>戦場に置かれたとき、自分の戦場のイジン1体かガーディアン1体を寝かせて、1ドローする。</text:p>
          </table:table-cell>
          <table:table-cell table:style-name="ce8" office:value-type="string" calcext:value-type="string">
            <text:p>1ドローする</text:p>
          </table:table-cell>
          <table:table-cell table:formula="of:=IFERROR(VLOOKUP([.$V331];[$遺業能力番号.$A$1:$遺業能力番号.$B$9];2;0);0)" office:value-type="float" office:value="4" calcext:value-type="float">
            <text:p>4</text:p>
          </table:table-cell>
          <table:table-cell office:value-type="string" calcext:value-type="string">
            <text:p>https://one-draw.jp/ijinden/cardlist/004/card/04_022.png</text:p>
          </table:table-cell>
          <table:table-cell table:formula="of:=CONCATENATE([$JSON.$A$1];[.$C331];[$JSON.$B$1];[.$E331];[$JSON.$C$1];[.$F331];[$JSON.$D$1];IF(ISNA([.$S331]);&quot;null&quot;;&quot;&quot;&quot;&quot;&amp;[.$S331]&amp;&quot;&quot;&quot;&quot;);[$JSON.$E$1];[.$U331];[$JSON.$F$1];IF(ISNA([.$V331]);&quot;null&quot;;&quot;&quot;&quot;&quot;&amp;[.$V331]&amp;&quot;&quot;&quot;&quot;);[$JSON.$G$1];[.$X331];[$JSON.$H$1];[.$H331];[$JSON.$I$1];[.J331];[$JSON.$J$1];[.$L331];[$JSON.$K$1];[.$O331];[$JSON.$L$1];[.$N331];[$JSON.$M$1];[.$R331];[$JSON.$N$1];[.$T331];[$JSON.$O$1];[.$W331];[$JSON.$P$1];[.$A331];[$JSON.$Q$1];[.$B331];[$JSON.$R$1])" office:value-type="string" office:string-value="{&quot;id&quot;:&quot;4-22&quot;,&quot;name&quot;:&quot;ピョートル・イリイチ・チャイコフスキー&quot;,&quot;kana&quot;:&quot;ぴょーとるいりいちちゃいこふすきー&quot;,&quot;traitText&quot;:&quot;音楽&quot;,&quot;ruleText&quot;:&quot;戦場に置かれたとき、自分の戦場のイジン1体かガーディアン1体を寝かせて、1ドローする。&quot;,&quot;legacyText&quot;:&quot;1ドローする&quot;,&quot;imageUrl&quot;:&quot;https://one-draw.jp/ijinden/cardlist/004/card/04_022.png&quot;,&quot;expansion&quot;:45,&quot;rarity&quot;:2,&quot;type&quot;:1,&quot;level&quot;:3,&quot;color&quot;:2,&quot;term&quot;:0,&quot;trait&quot;:4,&quot;legacy&quot;:4,&quot;orderTable&quot;:331,&quot;orderDeck&quot;:83}," calcext:value-type="string">
            <text:p>{"id":"4-22","name":"ピョートル・イリイチ・チャイコフスキー","kana":"ぴょーとるいりいちちゃいこふすきー","traitText":"音楽","ruleText":"戦場に置かれたとき、自分の戦場のイジン1体かガーディアン1体を寝かせて、1ドローする。","legacyText":"1ドローする","imageUrl":"https://one-draw.jp/ijinden/cardlist/004/card/04_022.png","expansion":45,"rarity":2,"type":1,"level":3,"color":2,"term":0,"trait":4,"legacy":4,"orderTable":331,"orderDeck":83},</text:p>
          </table:table-cell>
          <table:table-cell table:number-columns-repeated="16347"/>
        </table:table-row>
        <table:table-row table:style-name="ro2">
          <table:table-cell office:value-type="float" office:value="332" calcext:value-type="float">
            <text:p>332</text:p>
          </table:table-cell>
          <table:table-cell office:value-type="float" office:value="212" calcext:value-type="float">
            <text:p>212</text:p>
          </table:table-cell>
          <table:table-cell office:value-type="string" calcext:value-type="string">
            <text:p>4-23</text:p>
          </table:table-cell>
          <table:table-cell office:value-type="float" office:value="23" calcext:value-type="float">
            <text:p>23</text:p>
          </table:table-cell>
          <table:table-cell office:value-type="string" calcext:value-type="string">
            <text:p>岩倉具視</text:p>
          </table:table-cell>
          <table:table-cell office:value-type="string" calcext:value-type="string">
            <text:p>いわくらともみ</text:p>
          </table:table-cell>
          <table:table-cell office:value-type="string" calcext:value-type="string">
            <text:p>第４弾ブースターパック</text:p>
          </table:table-cell>
          <table:table-cell table:formula="of:=VLOOKUP([.G332];[$収録番号.$A$1:$収録番号.$B$9];2;0)" office:value-type="float" office:value="45" calcext:value-type="float">
            <text:p>45</text:p>
          </table:table-cell>
          <table:table-cell office:value-type="string" calcext:value-type="string">
            <text:p>R</text:p>
          </table:table-cell>
          <table:table-cell table:formula="of:=VLOOKUP([.I332];[$レアリティ番号.$A$1:$レアリティ番号.$B$4];2;0)" office:value-type="float" office:value="2" calcext:value-type="float">
            <text:p>2</text:p>
          </table:table-cell>
          <table:table-cell office:value-type="string" calcext:value-type="string">
            <text:p>イジン</text:p>
          </table:table-cell>
          <table:table-cell table:formula="of:=VLOOKUP([.K332];[$種類番号.$A$1:$種類番号.$B$4];2;0)" office:value-type="float" office:value="1" calcext:value-type="float">
            <text:p>1</text:p>
          </table:table-cell>
          <table:table-cell office:value-type="string" calcext:value-type="string">
            <text:p>緑</text:p>
          </table:table-cell>
          <table:table-cell table:formula="of:=VLOOKUP([.M332];[$色番号.$A$1:$色番号.$B$10];2;0)" office:value-type="float" office:value="4" calcext:value-type="float">
            <text:p>4</text:p>
          </table:table-cell>
          <table:table-cell office:value-type="float" office:value="7" calcext:value-type="float">
            <text:p>7</text:p>
          </table:table-cell>
          <table:table-cell table:formula="of:=NA()" office:value-type="string" office:string-value="" calcext:value-type="error">
            <text:p>#N/A</text:p>
          </table:table-cell>
          <table:table-cell office:value-type="string" calcext:value-type="string">
            <text:p>航海</text:p>
          </table:table-cell>
          <table:table-cell table:formula="of:=IFERROR(VLOOKUP([.$Q332];[$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332];[$特性番号.$A$1:$特性番号.$B$8];2;0);0)" office:value-type="float" office:value="0" calcext:value-type="float">
            <text:p>0</text:p>
          </table:table-cell>
          <table:table-cell office:value-type="string" calcext:value-type="string">
            <text:p>トリプルプレッシャー¶航海 - アタッカーになったとき、相手の戦場の色1つにつき、1ドローして、自分の戦場のイジンすべてを起こす。</text:p>
          </table:table-cell>
          <table:table-cell table:style-name="ce8" table:formula="of:=NA()" office:value-type="string" office:string-value="" calcext:value-type="error">
            <text:p>#N/A</text:p>
          </table:table-cell>
          <table:table-cell table:formula="of:=IFERROR(VLOOKUP([.$V332];[$遺業能力番号.$A$1:$遺業能力番号.$B$9];2;0);0)" office:value-type="float" office:value="0" calcext:value-type="float">
            <text:p>0</text:p>
          </table:table-cell>
          <table:table-cell office:value-type="string" calcext:value-type="string">
            <text:p>https://one-draw.jp/ijinden/cardlist/004/card/04_023.png</text:p>
          </table:table-cell>
          <table:table-cell table:formula="of:=CONCATENATE([$JSON.$A$1];[.$C332];[$JSON.$B$1];[.$E332];[$JSON.$C$1];[.$F332];[$JSON.$D$1];IF(ISNA([.$S332]);&quot;null&quot;;&quot;&quot;&quot;&quot;&amp;[.$S332]&amp;&quot;&quot;&quot;&quot;);[$JSON.$E$1];[.$U332];[$JSON.$F$1];IF(ISNA([.$V332]);&quot;null&quot;;&quot;&quot;&quot;&quot;&amp;[.$V332]&amp;&quot;&quot;&quot;&quot;);[$JSON.$G$1];[.$X332];[$JSON.$H$1];[.$H332];[$JSON.$I$1];[.J332];[$JSON.$J$1];[.$L332];[$JSON.$K$1];[.$O332];[$JSON.$L$1];[.$N332];[$JSON.$M$1];[.$R332];[$JSON.$N$1];[.$T332];[$JSON.$O$1];[.$W332];[$JSON.$P$1];[.$A332];[$JSON.$Q$1];[.$B332];[$JSON.$R$1])" office:value-type="string" office:string-value="{&quot;id&quot;:&quot;4-23&quot;,&quot;name&quot;:&quot;岩倉具視&quot;,&quot;kana&quot;:&quot;いわくらともみ&quot;,&quot;traitText&quot;:null,&quot;ruleText&quot;:&quot;トリプルプレッシャー¶航海 - アタッカーになったとき、相手の戦場の色1つにつき、1ドローして、自分の戦場のイジンすべてを起こす。&quot;,&quot;legacyText&quot;:null,&quot;imageUrl&quot;:&quot;https://one-draw.jp/ijinden/cardlist/004/card/04_023.png&quot;,&quot;expansion&quot;:45,&quot;rarity&quot;:2,&quot;type&quot;:1,&quot;level&quot;:7,&quot;color&quot;:4,&quot;term&quot;:1,&quot;trait&quot;:0,&quot;legacy&quot;:0,&quot;orderTable&quot;:332,&quot;orderDeck&quot;:212}," calcext:value-type="string">
            <text:p>{"id":"4-23","name":"岩倉具視","kana":"いわくらともみ","traitText":null,"ruleText":"トリプルプレッシャー¶航海 - アタッカーになったとき、相手の戦場の色1つにつき、1ドローして、自分の戦場のイジンすべてを起こす。","legacyText":null,"imageUrl":"https://one-draw.jp/ijinden/cardlist/004/card/04_023.png","expansion":45,"rarity":2,"type":1,"level":7,"color":4,"term":1,"trait":0,"legacy":0,"orderTable":332,"orderDeck":212},</text:p>
          </table:table-cell>
          <table:table-cell table:number-columns-repeated="16347"/>
        </table:table-row>
        <table:table-row table:style-name="ro2">
          <table:table-cell office:value-type="float" office:value="333" calcext:value-type="float">
            <text:p>333</text:p>
          </table:table-cell>
          <table:table-cell office:value-type="float" office:value="92" calcext:value-type="float">
            <text:p>92</text:p>
          </table:table-cell>
          <table:table-cell office:value-type="string" calcext:value-type="string">
            <text:p>4-24</text:p>
          </table:table-cell>
          <table:table-cell office:value-type="float" office:value="24" calcext:value-type="float">
            <text:p>24</text:p>
          </table:table-cell>
          <table:table-cell office:value-type="string" calcext:value-type="string">
            <text:p>クララ・ヨゼフィーネ・シューマン</text:p>
          </table:table-cell>
          <table:table-cell office:value-type="string" calcext:value-type="string">
            <text:p>くららよぜふぃーねしゅーまん</text:p>
          </table:table-cell>
          <table:table-cell office:value-type="string" calcext:value-type="string">
            <text:p>第４弾ブースターパック</text:p>
          </table:table-cell>
          <table:table-cell table:formula="of:=VLOOKUP([.G333];[$収録番号.$A$1:$収録番号.$B$9];2;0)" office:value-type="float" office:value="45" calcext:value-type="float">
            <text:p>45</text:p>
          </table:table-cell>
          <table:table-cell office:value-type="string" calcext:value-type="string">
            <text:p>N</text:p>
          </table:table-cell>
          <table:table-cell table:formula="of:=VLOOKUP([.I333];[$レアリティ番号.$A$1:$レアリティ番号.$B$4];2;0)" office:value-type="float" office:value="1" calcext:value-type="float">
            <text:p>1</text:p>
          </table:table-cell>
          <table:table-cell office:value-type="string" calcext:value-type="string">
            <text:p>イジン</text:p>
          </table:table-cell>
          <table:table-cell table:formula="of:=VLOOKUP([.K333];[$種類番号.$A$1:$種類番号.$B$4];2;0)" office:value-type="float" office:value="1" calcext:value-type="float">
            <text:p>1</text:p>
          </table:table-cell>
          <table:table-cell office:value-type="string" calcext:value-type="string">
            <text:p>緑</text:p>
          </table:table-cell>
          <table:table-cell table:formula="of:=VLOOKUP([.M333];[$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33];[$能力語番号.$A$1:$能力語番号.$B$10];2;0);0)" office:value-type="float" office:value="0" calcext:value-type="float">
            <text:p>0</text:p>
          </table:table-cell>
          <table:table-cell office:value-type="string" calcext:value-type="string">
            <text:p>音楽</text:p>
          </table:table-cell>
          <table:table-cell table:formula="of:=IFERROR(VLOOKUP([.$S333];[$特性番号.$A$1:$特性番号.$B$8];2;0);0)" office:value-type="float" office:value="4" calcext:value-type="float">
            <text:p>4</text:p>
          </table:table-cell>
          <table:table-cell office:value-type="string" calcext:value-type="string">
            <text:p>「音楽」イジンが戦場に置かれたとき、これを寝かせて発動できる。戦場の寝ているイジン1体か寝ているガーディアン1体を墓地に置く。</text:p>
          </table:table-cell>
          <table:table-cell table:style-name="ce8" office:value-type="string" calcext:value-type="string">
            <text:p>1ドローする</text:p>
          </table:table-cell>
          <table:table-cell table:formula="of:=IFERROR(VLOOKUP([.$V333];[$遺業能力番号.$A$1:$遺業能力番号.$B$9];2;0);0)" office:value-type="float" office:value="4" calcext:value-type="float">
            <text:p>4</text:p>
          </table:table-cell>
          <table:table-cell office:value-type="string" calcext:value-type="string">
            <text:p>https://one-draw.jp/ijinden/cardlist/004/card/04_024.png</text:p>
          </table:table-cell>
          <table:table-cell table:formula="of:=CONCATENATE([$JSON.$A$1];[.$C333];[$JSON.$B$1];[.$E333];[$JSON.$C$1];[.$F333];[$JSON.$D$1];IF(ISNA([.$S333]);&quot;null&quot;;&quot;&quot;&quot;&quot;&amp;[.$S333]&amp;&quot;&quot;&quot;&quot;);[$JSON.$E$1];[.$U333];[$JSON.$F$1];IF(ISNA([.$V333]);&quot;null&quot;;&quot;&quot;&quot;&quot;&amp;[.$V333]&amp;&quot;&quot;&quot;&quot;);[$JSON.$G$1];[.$X333];[$JSON.$H$1];[.$H333];[$JSON.$I$1];[.J333];[$JSON.$J$1];[.$L333];[$JSON.$K$1];[.$O333];[$JSON.$L$1];[.$N333];[$JSON.$M$1];[.$R333];[$JSON.$N$1];[.$T333];[$JSON.$O$1];[.$W333];[$JSON.$P$1];[.$A333];[$JSON.$Q$1];[.$B333];[$JSON.$R$1])" office:value-type="string" office:string-value="{&quot;id&quot;:&quot;4-24&quot;,&quot;name&quot;:&quot;クララ・ヨゼフィーネ・シューマン&quot;,&quot;kana&quot;:&quot;くららよぜふぃーねしゅーまん&quot;,&quot;traitText&quot;:&quot;音楽&quot;,&quot;ruleText&quot;:&quot;「音楽」イジンが戦場に置かれたとき、これを寝かせて発動できる。戦場の寝ているイジン1体か寝ているガーディアン1体を墓地に置く。&quot;,&quot;legacyText&quot;:&quot;1ドローする&quot;,&quot;imageUrl&quot;:&quot;https://one-draw.jp/ijinden/cardlist/004/card/04_024.png&quot;,&quot;expansion&quot;:45,&quot;rarity&quot;:1,&quot;type&quot;:1,&quot;level&quot;:3,&quot;color&quot;:4,&quot;term&quot;:0,&quot;trait&quot;:4,&quot;legacy&quot;:4,&quot;orderTable&quot;:333,&quot;orderDeck&quot;:92}," calcext:value-type="string">
            <text:p>{"id":"4-24","name":"クララ・ヨゼフィーネ・シューマン","kana":"くららよぜふぃーねしゅーまん","traitText":"音楽","ruleText":"「音楽」イジンが戦場に置かれたとき、これを寝かせて発動できる。戦場の寝ているイジン1体か寝ているガーディアン1体を墓地に置く。","legacyText":"1ドローする","imageUrl":"https://one-draw.jp/ijinden/cardlist/004/card/04_024.png","expansion":45,"rarity":1,"type":1,"level":3,"color":4,"term":0,"trait":4,"legacy":4,"orderTable":333,"orderDeck":92},</text:p>
          </table:table-cell>
          <table:table-cell table:number-columns-repeated="16347"/>
        </table:table-row>
        <table:table-row table:style-name="ro2">
          <table:table-cell office:value-type="float" office:value="334" calcext:value-type="float">
            <text:p>334</text:p>
          </table:table-cell>
          <table:table-cell office:value-type="float" office:value="170" calcext:value-type="float">
            <text:p>170</text:p>
          </table:table-cell>
          <table:table-cell office:value-type="string" calcext:value-type="string">
            <text:p>4-25</text:p>
          </table:table-cell>
          <table:table-cell office:value-type="float" office:value="25" calcext:value-type="float">
            <text:p>25</text:p>
          </table:table-cell>
          <table:table-cell office:value-type="string" calcext:value-type="string">
            <text:p>間宮林蔵</text:p>
          </table:table-cell>
          <table:table-cell office:value-type="string" calcext:value-type="string">
            <text:p>まみやりんぞう</text:p>
          </table:table-cell>
          <table:table-cell office:value-type="string" calcext:value-type="string">
            <text:p>第４弾ブースターパック</text:p>
          </table:table-cell>
          <table:table-cell table:formula="of:=VLOOKUP([.G334];[$収録番号.$A$1:$収録番号.$B$9];2;0)" office:value-type="float" office:value="45" calcext:value-type="float">
            <text:p>45</text:p>
          </table:table-cell>
          <table:table-cell office:value-type="string" calcext:value-type="string">
            <text:p>N</text:p>
          </table:table-cell>
          <table:table-cell table:formula="of:=VLOOKUP([.I334];[$レアリティ番号.$A$1:$レアリティ番号.$B$4];2;0)" office:value-type="float" office:value="1" calcext:value-type="float">
            <text:p>1</text:p>
          </table:table-cell>
          <table:table-cell office:value-type="string" calcext:value-type="string">
            <text:p>イジン</text:p>
          </table:table-cell>
          <table:table-cell table:formula="of:=VLOOKUP([.K334];[$種類番号.$A$1:$種類番号.$B$4];2;0)" office:value-type="float" office:value="1" calcext:value-type="float">
            <text:p>1</text:p>
          </table:table-cell>
          <table:table-cell office:value-type="string" calcext:value-type="string">
            <text:p>緑</text:p>
          </table:table-cell>
          <table:table-cell table:formula="of:=VLOOKUP([.M334];[$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3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34];[$特性番号.$A$1:$特性番号.$B$8];2;0);0)" office:value-type="float" office:value="0" calcext:value-type="float">
            <text:p>0</text:p>
          </table:table-cell>
          <table:table-cell office:value-type="string" calcext:value-type="string">
            <text:p>戦場に置かれたとき、戦場のハイケイの色1つにつき1つまで、戦場か魔力ゾーンの裏のカードを手札に戻す。</text:p>
          </table:table-cell>
          <table:table-cell table:style-name="ce8" table:formula="of:=NA()" office:value-type="string" office:string-value="" calcext:value-type="error">
            <text:p>#N/A</text:p>
          </table:table-cell>
          <table:table-cell table:formula="of:=IFERROR(VLOOKUP([.$V334];[$遺業能力番号.$A$1:$遺業能力番号.$B$9];2;0);0)" office:value-type="float" office:value="0" calcext:value-type="float">
            <text:p>0</text:p>
          </table:table-cell>
          <table:table-cell office:value-type="string" calcext:value-type="string">
            <text:p>https://one-draw.jp/ijinden/cardlist/004/card/04_025.png</text:p>
          </table:table-cell>
          <table:table-cell table:formula="of:=CONCATENATE([$JSON.$A$1];[.$C334];[$JSON.$B$1];[.$E334];[$JSON.$C$1];[.$F334];[$JSON.$D$1];IF(ISNA([.$S334]);&quot;null&quot;;&quot;&quot;&quot;&quot;&amp;[.$S334]&amp;&quot;&quot;&quot;&quot;);[$JSON.$E$1];[.$U334];[$JSON.$F$1];IF(ISNA([.$V334]);&quot;null&quot;;&quot;&quot;&quot;&quot;&amp;[.$V334]&amp;&quot;&quot;&quot;&quot;);[$JSON.$G$1];[.$X334];[$JSON.$H$1];[.$H334];[$JSON.$I$1];[.J334];[$JSON.$J$1];[.$L334];[$JSON.$K$1];[.$O334];[$JSON.$L$1];[.$N334];[$JSON.$M$1];[.$R334];[$JSON.$N$1];[.$T334];[$JSON.$O$1];[.$W334];[$JSON.$P$1];[.$A334];[$JSON.$Q$1];[.$B334];[$JSON.$R$1])" office:value-type="string" office:string-value="{&quot;id&quot;:&quot;4-25&quot;,&quot;name&quot;:&quot;間宮林蔵&quot;,&quot;kana&quot;:&quot;まみやりんぞう&quot;,&quot;traitText&quot;:null,&quot;ruleText&quot;:&quot;戦場に置かれたとき、戦場のハイケイの色1つにつき1つまで、戦場か魔力ゾーンの裏のカードを手札に戻す。&quot;,&quot;legacyText&quot;:null,&quot;imageUrl&quot;:&quot;https://one-draw.jp/ijinden/cardlist/004/card/04_025.png&quot;,&quot;expansion&quot;:45,&quot;rarity&quot;:1,&quot;type&quot;:1,&quot;level&quot;:5,&quot;color&quot;:4,&quot;term&quot;:0,&quot;trait&quot;:0,&quot;legacy&quot;:0,&quot;orderTable&quot;:334,&quot;orderDeck&quot;:170}," calcext:value-type="string">
            <text:p>{"id":"4-25","name":"間宮林蔵","kana":"まみやりんぞう","traitText":null,"ruleText":"戦場に置かれたとき、戦場のハイケイの色1つにつき1つまで、戦場か魔力ゾーンの裏のカードを手札に戻す。","legacyText":null,"imageUrl":"https://one-draw.jp/ijinden/cardlist/004/card/04_025.png","expansion":45,"rarity":1,"type":1,"level":5,"color":4,"term":0,"trait":0,"legacy":0,"orderTable":334,"orderDeck":170},</text:p>
          </table:table-cell>
          <table:table-cell table:number-columns-repeated="16347"/>
        </table:table-row>
        <table:table-row table:style-name="ro2">
          <table:table-cell office:value-type="float" office:value="335" calcext:value-type="float">
            <text:p>335</text:p>
          </table:table-cell>
          <table:table-cell office:value-type="float" office:value="51" calcext:value-type="float">
            <text:p>51</text:p>
          </table:table-cell>
          <table:table-cell office:value-type="string" calcext:value-type="string">
            <text:p>4-26</text:p>
          </table:table-cell>
          <table:table-cell office:value-type="float" office:value="26" calcext:value-type="float">
            <text:p>26</text:p>
          </table:table-cell>
          <table:table-cell office:value-type="string" calcext:value-type="string">
            <text:p>徳川斉昭</text:p>
          </table:table-cell>
          <table:table-cell office:value-type="string" calcext:value-type="string">
            <text:p>とくがわなりあき</text:p>
          </table:table-cell>
          <table:table-cell office:value-type="string" calcext:value-type="string">
            <text:p>第４弾ブースターパック</text:p>
          </table:table-cell>
          <table:table-cell table:formula="of:=VLOOKUP([.G335];[$収録番号.$A$1:$収録番号.$B$9];2;0)" office:value-type="float" office:value="45" calcext:value-type="float">
            <text:p>45</text:p>
          </table:table-cell>
          <table:table-cell office:value-type="string" calcext:value-type="string">
            <text:p>N</text:p>
          </table:table-cell>
          <table:table-cell table:formula="of:=VLOOKUP([.I335];[$レアリティ番号.$A$1:$レアリティ番号.$B$4];2;0)" office:value-type="float" office:value="1" calcext:value-type="float">
            <text:p>1</text:p>
          </table:table-cell>
          <table:table-cell office:value-type="string" calcext:value-type="string">
            <text:p>イジン</text:p>
          </table:table-cell>
          <table:table-cell table:formula="of:=VLOOKUP([.K335];[$種類番号.$A$1:$種類番号.$B$4];2;0)" office:value-type="float" office:value="1" calcext:value-type="float">
            <text:p>1</text:p>
          </table:table-cell>
          <table:table-cell office:value-type="string" calcext:value-type="string">
            <text:p>緑</text:p>
          </table:table-cell>
          <table:table-cell table:formula="of:=VLOOKUP([.M335];[$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3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35];[$特性番号.$A$1:$特性番号.$B$8];2;0);0)" office:value-type="float" office:value="0" calcext:value-type="float">
            <text:p>0</text:p>
          </table:table-cell>
          <table:table-cell office:value-type="string" calcext:value-type="string">
            <text:p>この能力はターンに1回しか発動しない。戦場のイジンが寝たときに発動できる。ターンプレイヤーは1ドローする。</text:p>
          </table:table-cell>
          <table:table-cell table:style-name="ce8" office:value-type="string" calcext:value-type="string">
            <text:p>1ドローする</text:p>
          </table:table-cell>
          <table:table-cell table:formula="of:=IFERROR(VLOOKUP([.$V335];[$遺業能力番号.$A$1:$遺業能力番号.$B$9];2;0);0)" office:value-type="float" office:value="4" calcext:value-type="float">
            <text:p>4</text:p>
          </table:table-cell>
          <table:table-cell office:value-type="string" calcext:value-type="string">
            <text:p>https://one-draw.jp/ijinden/cardlist/004/card/04_026.png</text:p>
          </table:table-cell>
          <table:table-cell table:formula="of:=CONCATENATE([$JSON.$A$1];[.$C335];[$JSON.$B$1];[.$E335];[$JSON.$C$1];[.$F335];[$JSON.$D$1];IF(ISNA([.$S335]);&quot;null&quot;;&quot;&quot;&quot;&quot;&amp;[.$S335]&amp;&quot;&quot;&quot;&quot;);[$JSON.$E$1];[.$U335];[$JSON.$F$1];IF(ISNA([.$V335]);&quot;null&quot;;&quot;&quot;&quot;&quot;&amp;[.$V335]&amp;&quot;&quot;&quot;&quot;);[$JSON.$G$1];[.$X335];[$JSON.$H$1];[.$H335];[$JSON.$I$1];[.J335];[$JSON.$J$1];[.$L335];[$JSON.$K$1];[.$O335];[$JSON.$L$1];[.$N335];[$JSON.$M$1];[.$R335];[$JSON.$N$1];[.$T335];[$JSON.$O$1];[.$W335];[$JSON.$P$1];[.$A335];[$JSON.$Q$1];[.$B335];[$JSON.$R$1])" office:value-type="string" office:string-value="{&quot;id&quot;:&quot;4-26&quot;,&quot;name&quot;:&quot;徳川斉昭&quot;,&quot;kana&quot;:&quot;とくがわなりあき&quot;,&quot;traitText&quot;:null,&quot;ruleText&quot;:&quot;この能力はターンに1回しか発動しない。戦場のイジンが寝たときに発動できる。ターンプレイヤーは1ドローする。&quot;,&quot;legacyText&quot;:&quot;1ドローする&quot;,&quot;imageUrl&quot;:&quot;https://one-draw.jp/ijinden/cardlist/004/card/04_026.png&quot;,&quot;expansion&quot;:45,&quot;rarity&quot;:1,&quot;type&quot;:1,&quot;level&quot;:2,&quot;color&quot;:4,&quot;term&quot;:0,&quot;trait&quot;:0,&quot;legacy&quot;:4,&quot;orderTable&quot;:335,&quot;orderDeck&quot;:51}," calcext:value-type="string">
            <text:p>{"id":"4-26","name":"徳川斉昭","kana":"とくがわなりあき","traitText":null,"ruleText":"この能力はターンに1回しか発動しない。戦場のイジンが寝たときに発動できる。ターンプレイヤーは1ドローする。","legacyText":"1ドローする","imageUrl":"https://one-draw.jp/ijinden/cardlist/004/card/04_026.png","expansion":45,"rarity":1,"type":1,"level":2,"color":4,"term":0,"trait":0,"legacy":4,"orderTable":335,"orderDeck":51},</text:p>
          </table:table-cell>
          <table:table-cell table:number-columns-repeated="16347"/>
        </table:table-row>
        <table:table-row table:style-name="ro2">
          <table:table-cell office:value-type="float" office:value="336" calcext:value-type="float">
            <text:p>336</text:p>
          </table:table-cell>
          <table:table-cell office:value-type="float" office:value="131" calcext:value-type="float">
            <text:p>131</text:p>
          </table:table-cell>
          <table:table-cell office:value-type="string" calcext:value-type="string">
            <text:p>4-27</text:p>
          </table:table-cell>
          <table:table-cell office:value-type="float" office:value="27" calcext:value-type="float">
            <text:p>27</text:p>
          </table:table-cell>
          <table:table-cell office:value-type="string" calcext:value-type="string">
            <text:p>鈴木春信</text:p>
          </table:table-cell>
          <table:table-cell office:value-type="string" calcext:value-type="string">
            <text:p>すずきはるのぶ</text:p>
          </table:table-cell>
          <table:table-cell office:value-type="string" calcext:value-type="string">
            <text:p>第４弾ブースターパック</text:p>
          </table:table-cell>
          <table:table-cell table:formula="of:=VLOOKUP([.G336];[$収録番号.$A$1:$収録番号.$B$9];2;0)" office:value-type="float" office:value="45" calcext:value-type="float">
            <text:p>45</text:p>
          </table:table-cell>
          <table:table-cell office:value-type="string" calcext:value-type="string">
            <text:p>N</text:p>
          </table:table-cell>
          <table:table-cell table:formula="of:=VLOOKUP([.I336];[$レアリティ番号.$A$1:$レアリティ番号.$B$4];2;0)" office:value-type="float" office:value="1" calcext:value-type="float">
            <text:p>1</text:p>
          </table:table-cell>
          <table:table-cell office:value-type="string" calcext:value-type="string">
            <text:p>イジン</text:p>
          </table:table-cell>
          <table:table-cell table:formula="of:=VLOOKUP([.K336];[$種類番号.$A$1:$種類番号.$B$4];2;0)" office:value-type="float" office:value="1" calcext:value-type="float">
            <text:p>1</text:p>
          </table:table-cell>
          <table:table-cell office:value-type="string" calcext:value-type="string">
            <text:p>緑</text:p>
          </table:table-cell>
          <table:table-cell table:formula="of:=VLOOKUP([.M336];[$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36];[$能力語番号.$A$1:$能力語番号.$B$10];2;0);0)" office:value-type="float" office:value="0" calcext:value-type="float">
            <text:p>0</text:p>
          </table:table-cell>
          <table:table-cell office:value-type="string" calcext:value-type="string">
            <text:p>美術</text:p>
          </table:table-cell>
          <table:table-cell table:formula="of:=IFERROR(VLOOKUP([.$S336];[$特性番号.$A$1:$特性番号.$B$8];2;0);0)" office:value-type="float" office:value="2" calcext:value-type="float">
            <text:p>2</text:p>
          </table:table-cell>
          <table:table-cell office:value-type="string" calcext:value-type="string">
            <text:p>戦場に置かれたとき、自分の魔力ゾーンの裏のカード1つを手札に戻して発動できる。自分の山札の上から1枚を裏のまま魔力ゾーンに置く。</text:p>
          </table:table-cell>
          <table:table-cell table:style-name="ce8" office:value-type="string" calcext:value-type="string">
            <text:p>1ドローする</text:p>
          </table:table-cell>
          <table:table-cell table:formula="of:=IFERROR(VLOOKUP([.$V336];[$遺業能力番号.$A$1:$遺業能力番号.$B$9];2;0);0)" office:value-type="float" office:value="4" calcext:value-type="float">
            <text:p>4</text:p>
          </table:table-cell>
          <table:table-cell office:value-type="string" calcext:value-type="string">
            <text:p>https://one-draw.jp/ijinden/cardlist/004/card/04_027.png</text:p>
          </table:table-cell>
          <table:table-cell table:formula="of:=CONCATENATE([$JSON.$A$1];[.$C336];[$JSON.$B$1];[.$E336];[$JSON.$C$1];[.$F336];[$JSON.$D$1];IF(ISNA([.$S336]);&quot;null&quot;;&quot;&quot;&quot;&quot;&amp;[.$S336]&amp;&quot;&quot;&quot;&quot;);[$JSON.$E$1];[.$U336];[$JSON.$F$1];IF(ISNA([.$V336]);&quot;null&quot;;&quot;&quot;&quot;&quot;&amp;[.$V336]&amp;&quot;&quot;&quot;&quot;);[$JSON.$G$1];[.$X336];[$JSON.$H$1];[.$H336];[$JSON.$I$1];[.J336];[$JSON.$J$1];[.$L336];[$JSON.$K$1];[.$O336];[$JSON.$L$1];[.$N336];[$JSON.$M$1];[.$R336];[$JSON.$N$1];[.$T336];[$JSON.$O$1];[.$W336];[$JSON.$P$1];[.$A336];[$JSON.$Q$1];[.$B336];[$JSON.$R$1])" office:value-type="string" office:string-value="{&quot;id&quot;:&quot;4-27&quot;,&quot;name&quot;:&quot;鈴木春信&quot;,&quot;kana&quot;:&quot;すずきはるのぶ&quot;,&quot;traitText&quot;:&quot;美術&quot;,&quot;ruleText&quot;:&quot;戦場に置かれたとき、自分の魔力ゾーンの裏のカード1つを手札に戻して発動できる。自分の山札の上から1枚を裏のまま魔力ゾーンに置く。&quot;,&quot;legacyText&quot;:&quot;1ドローする&quot;,&quot;imageUrl&quot;:&quot;https://one-draw.jp/ijinden/cardlist/004/card/04_027.png&quot;,&quot;expansion&quot;:45,&quot;rarity&quot;:1,&quot;type&quot;:1,&quot;level&quot;:4,&quot;color&quot;:4,&quot;term&quot;:0,&quot;trait&quot;:2,&quot;legacy&quot;:4,&quot;orderTable&quot;:336,&quot;orderDeck&quot;:131}," calcext:value-type="string">
            <text:p>{"id":"4-27","name":"鈴木春信","kana":"すずきはるのぶ","traitText":"美術","ruleText":"戦場に置かれたとき、自分の魔力ゾーンの裏のカード1つを手札に戻して発動できる。自分の山札の上から1枚を裏のまま魔力ゾーンに置く。","legacyText":"1ドローする","imageUrl":"https://one-draw.jp/ijinden/cardlist/004/card/04_027.png","expansion":45,"rarity":1,"type":1,"level":4,"color":4,"term":0,"trait":2,"legacy":4,"orderTable":336,"orderDeck":131},</text:p>
          </table:table-cell>
          <table:table-cell table:number-columns-repeated="16347"/>
        </table:table-row>
        <table:table-row table:style-name="ro2">
          <table:table-cell office:value-type="float" office:value="337" calcext:value-type="float">
            <text:p>337</text:p>
          </table:table-cell>
          <table:table-cell office:value-type="float" office:value="93" calcext:value-type="float">
            <text:p>93</text:p>
          </table:table-cell>
          <table:table-cell office:value-type="string" calcext:value-type="string">
            <text:p>4-28</text:p>
          </table:table-cell>
          <table:table-cell office:value-type="float" office:value="28" calcext:value-type="float">
            <text:p>28</text:p>
          </table:table-cell>
          <table:table-cell office:value-type="string" calcext:value-type="string">
            <text:p>歌川広重</text:p>
          </table:table-cell>
          <table:table-cell office:value-type="string" calcext:value-type="string">
            <text:p>うたがわひろしげ</text:p>
          </table:table-cell>
          <table:table-cell office:value-type="string" calcext:value-type="string">
            <text:p>第４弾ブースターパック</text:p>
          </table:table-cell>
          <table:table-cell table:formula="of:=VLOOKUP([.G337];[$収録番号.$A$1:$収録番号.$B$9];2;0)" office:value-type="float" office:value="45" calcext:value-type="float">
            <text:p>45</text:p>
          </table:table-cell>
          <table:table-cell office:value-type="string" calcext:value-type="string">
            <text:p>R</text:p>
          </table:table-cell>
          <table:table-cell table:formula="of:=VLOOKUP([.I337];[$レアリティ番号.$A$1:$レアリティ番号.$B$4];2;0)" office:value-type="float" office:value="2" calcext:value-type="float">
            <text:p>2</text:p>
          </table:table-cell>
          <table:table-cell office:value-type="string" calcext:value-type="string">
            <text:p>イジン</text:p>
          </table:table-cell>
          <table:table-cell table:formula="of:=VLOOKUP([.K337];[$種類番号.$A$1:$種類番号.$B$4];2;0)" office:value-type="float" office:value="1" calcext:value-type="float">
            <text:p>1</text:p>
          </table:table-cell>
          <table:table-cell office:value-type="string" calcext:value-type="string">
            <text:p>緑</text:p>
          </table:table-cell>
          <table:table-cell table:formula="of:=VLOOKUP([.M337];[$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37];[$能力語番号.$A$1:$能力語番号.$B$10];2;0);0)" office:value-type="float" office:value="0" calcext:value-type="float">
            <text:p>0</text:p>
          </table:table-cell>
          <table:table-cell office:value-type="string" calcext:value-type="string">
            <text:p>美術</text:p>
          </table:table-cell>
          <table:table-cell table:formula="of:=IFERROR(VLOOKUP([.$S337];[$特性番号.$A$1:$特性番号.$B$8];2;0);0)" office:value-type="float" office:value="2" calcext:value-type="float">
            <text:p>2</text:p>
          </table:table-cell>
          <table:table-cell office:value-type="string" calcext:value-type="string">
            <text:p>戦場に置かれたとき、2ドローして、自分の手札のカード2つか「美術」カード1つを墓地に置く。</text:p>
          </table:table-cell>
          <table:table-cell table:style-name="ce8" office:value-type="string" calcext:value-type="string">
            <text:p>1ドローする</text:p>
          </table:table-cell>
          <table:table-cell table:formula="of:=IFERROR(VLOOKUP([.$V337];[$遺業能力番号.$A$1:$遺業能力番号.$B$9];2;0);0)" office:value-type="float" office:value="4" calcext:value-type="float">
            <text:p>4</text:p>
          </table:table-cell>
          <table:table-cell office:value-type="string" calcext:value-type="string">
            <text:p>https://one-draw.jp/ijinden/cardlist/004/card/04_028.png</text:p>
          </table:table-cell>
          <table:table-cell table:formula="of:=CONCATENATE([$JSON.$A$1];[.$C337];[$JSON.$B$1];[.$E337];[$JSON.$C$1];[.$F337];[$JSON.$D$1];IF(ISNA([.$S337]);&quot;null&quot;;&quot;&quot;&quot;&quot;&amp;[.$S337]&amp;&quot;&quot;&quot;&quot;);[$JSON.$E$1];[.$U337];[$JSON.$F$1];IF(ISNA([.$V337]);&quot;null&quot;;&quot;&quot;&quot;&quot;&amp;[.$V337]&amp;&quot;&quot;&quot;&quot;);[$JSON.$G$1];[.$X337];[$JSON.$H$1];[.$H337];[$JSON.$I$1];[.J337];[$JSON.$J$1];[.$L337];[$JSON.$K$1];[.$O337];[$JSON.$L$1];[.$N337];[$JSON.$M$1];[.$R337];[$JSON.$N$1];[.$T337];[$JSON.$O$1];[.$W337];[$JSON.$P$1];[.$A337];[$JSON.$Q$1];[.$B337];[$JSON.$R$1])" office:value-type="string" office:string-value="{&quot;id&quot;:&quot;4-28&quot;,&quot;name&quot;:&quot;歌川広重&quot;,&quot;kana&quot;:&quot;うたがわひろしげ&quot;,&quot;traitText&quot;:&quot;美術&quot;,&quot;ruleText&quot;:&quot;戦場に置かれたとき、2ドローして、自分の手札のカード2つか「美術」カード1つを墓地に置く。&quot;,&quot;legacyText&quot;:&quot;1ドローする&quot;,&quot;imageUrl&quot;:&quot;https://one-draw.jp/ijinden/cardlist/004/card/04_028.png&quot;,&quot;expansion&quot;:45,&quot;rarity&quot;:2,&quot;type&quot;:1,&quot;level&quot;:3,&quot;color&quot;:4,&quot;term&quot;:0,&quot;trait&quot;:2,&quot;legacy&quot;:4,&quot;orderTable&quot;:337,&quot;orderDeck&quot;:93}," calcext:value-type="string">
            <text:p>{"id":"4-28","name":"歌川広重","kana":"うたがわひろしげ","traitText":"美術","ruleText":"戦場に置かれたとき、2ドローして、自分の手札のカード2つか「美術」カード1つを墓地に置く。","legacyText":"1ドローする","imageUrl":"https://one-draw.jp/ijinden/cardlist/004/card/04_028.png","expansion":45,"rarity":2,"type":1,"level":3,"color":4,"term":0,"trait":2,"legacy":4,"orderTable":337,"orderDeck":93},</text:p>
          </table:table-cell>
          <table:table-cell table:number-columns-repeated="16347"/>
        </table:table-row>
        <table:table-row table:style-name="ro2">
          <table:table-cell office:value-type="float" office:value="338" calcext:value-type="float">
            <text:p>338</text:p>
          </table:table-cell>
          <table:table-cell office:value-type="float" office:value="99" calcext:value-type="float">
            <text:p>99</text:p>
          </table:table-cell>
          <table:table-cell office:value-type="string" calcext:value-type="string">
            <text:p>4-29</text:p>
          </table:table-cell>
          <table:table-cell office:value-type="float" office:value="29" calcext:value-type="float">
            <text:p>29</text:p>
          </table:table-cell>
          <table:table-cell office:value-type="string" calcext:value-type="string">
            <text:p>松平容保</text:p>
          </table:table-cell>
          <table:table-cell office:value-type="string" calcext:value-type="string">
            <text:p>まつだいらかたもり</text:p>
          </table:table-cell>
          <table:table-cell office:value-type="string" calcext:value-type="string">
            <text:p>第４弾ブースターパック</text:p>
          </table:table-cell>
          <table:table-cell table:formula="of:=VLOOKUP([.G338];[$収録番号.$A$1:$収録番号.$B$9];2;0)" office:value-type="float" office:value="45" calcext:value-type="float">
            <text:p>45</text:p>
          </table:table-cell>
          <table:table-cell office:value-type="string" calcext:value-type="string">
            <text:p>R</text:p>
          </table:table-cell>
          <table:table-cell table:formula="of:=VLOOKUP([.I338];[$レアリティ番号.$A$1:$レアリティ番号.$B$4];2;0)" office:value-type="float" office:value="2" calcext:value-type="float">
            <text:p>2</text:p>
          </table:table-cell>
          <table:table-cell office:value-type="string" calcext:value-type="string">
            <text:p>イジン</text:p>
          </table:table-cell>
          <table:table-cell table:formula="of:=VLOOKUP([.K338];[$種類番号.$A$1:$種類番号.$B$4];2;0)" office:value-type="float" office:value="1" calcext:value-type="float">
            <text:p>1</text:p>
          </table:table-cell>
          <table:table-cell office:value-type="string" calcext:value-type="string">
            <text:p>黄</text:p>
          </table:table-cell>
          <table:table-cell table:formula="of:=VLOOKUP([.M338];[$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3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38];[$特性番号.$A$1:$特性番号.$B$8];2;0);0)" office:value-type="float" office:value="0" calcext:value-type="float">
            <text:p>0</text:p>
          </table:table-cell>
          <table:table-cell office:value-type="string" calcext:value-type="string">
            <text:p>スタンド¶戦場に置かれたとき、墓地のマリョクでないカード1つを山札の下に戻して発動できる。1ドローする。</text:p>
          </table:table-cell>
          <table:table-cell table:style-name="ce8" office:value-type="string" calcext:value-type="string">
            <text:p>喪神</text:p>
          </table:table-cell>
          <table:table-cell table:formula="of:=IFERROR(VLOOKUP([.$V338];[$遺業能力番号.$A$1:$遺業能力番号.$B$9];2;0);0)" office:value-type="float" office:value="9" calcext:value-type="float">
            <text:p>9</text:p>
          </table:table-cell>
          <table:table-cell office:value-type="string" calcext:value-type="string">
            <text:p>https://one-draw.jp/ijinden/cardlist/004/card/04_029.png</text:p>
          </table:table-cell>
          <table:table-cell table:formula="of:=CONCATENATE([$JSON.$A$1];[.$C338];[$JSON.$B$1];[.$E338];[$JSON.$C$1];[.$F338];[$JSON.$D$1];IF(ISNA([.$S338]);&quot;null&quot;;&quot;&quot;&quot;&quot;&amp;[.$S338]&amp;&quot;&quot;&quot;&quot;);[$JSON.$E$1];[.$U338];[$JSON.$F$1];IF(ISNA([.$V338]);&quot;null&quot;;&quot;&quot;&quot;&quot;&amp;[.$V338]&amp;&quot;&quot;&quot;&quot;);[$JSON.$G$1];[.$X338];[$JSON.$H$1];[.$H338];[$JSON.$I$1];[.J338];[$JSON.$J$1];[.$L338];[$JSON.$K$1];[.$O338];[$JSON.$L$1];[.$N338];[$JSON.$M$1];[.$R338];[$JSON.$N$1];[.$T338];[$JSON.$O$1];[.$W338];[$JSON.$P$1];[.$A338];[$JSON.$Q$1];[.$B338];[$JSON.$R$1])" office:value-type="string" office:string-value="{&quot;id&quot;:&quot;4-29&quot;,&quot;name&quot;:&quot;松平容保&quot;,&quot;kana&quot;:&quot;まつだいらかたもり&quot;,&quot;traitText&quot;:null,&quot;ruleText&quot;:&quot;スタンド¶戦場に置かれたとき、墓地のマリョクでないカード1つを山札の下に戻して発動できる。1ドローする。&quot;,&quot;legacyText&quot;:&quot;喪神&quot;,&quot;imageUrl&quot;:&quot;https://one-draw.jp/ijinden/cardlist/004/card/04_029.png&quot;,&quot;expansion&quot;:45,&quot;rarity&quot;:2,&quot;type&quot;:1,&quot;level&quot;:3,&quot;color&quot;:8,&quot;term&quot;:0,&quot;trait&quot;:0,&quot;legacy&quot;:9,&quot;orderTable&quot;:338,&quot;orderDeck&quot;:99}," calcext:value-type="string">
            <text:p>{"id":"4-29","name":"松平容保","kana":"まつだいらかたもり","traitText":null,"ruleText":"スタンド¶戦場に置かれたとき、墓地のマリョクでないカード1つを山札の下に戻して発動できる。1ドローする。","legacyText":"喪神","imageUrl":"https://one-draw.jp/ijinden/cardlist/004/card/04_029.png","expansion":45,"rarity":2,"type":1,"level":3,"color":8,"term":0,"trait":0,"legacy":9,"orderTable":338,"orderDeck":99},</text:p>
          </table:table-cell>
          <table:table-cell table:number-columns-repeated="16347"/>
        </table:table-row>
        <table:table-row table:style-name="ro2">
          <table:table-cell office:value-type="float" office:value="339" calcext:value-type="float">
            <text:p>339</text:p>
          </table:table-cell>
          <table:table-cell office:value-type="float" office:value="57" calcext:value-type="float">
            <text:p>57</text:p>
          </table:table-cell>
          <table:table-cell office:value-type="string" calcext:value-type="string">
            <text:p>4-30</text:p>
          </table:table-cell>
          <table:table-cell office:value-type="float" office:value="30" calcext:value-type="float">
            <text:p>30</text:p>
          </table:table-cell>
          <table:table-cell office:value-type="string" calcext:value-type="string">
            <text:p>新島八重</text:p>
          </table:table-cell>
          <table:table-cell office:value-type="string" calcext:value-type="string">
            <text:p>にいじまやえ</text:p>
          </table:table-cell>
          <table:table-cell office:value-type="string" calcext:value-type="string">
            <text:p>第４弾ブースターパック</text:p>
          </table:table-cell>
          <table:table-cell table:formula="of:=VLOOKUP([.G339];[$収録番号.$A$1:$収録番号.$B$9];2;0)" office:value-type="float" office:value="45" calcext:value-type="float">
            <text:p>45</text:p>
          </table:table-cell>
          <table:table-cell office:value-type="string" calcext:value-type="string">
            <text:p>N</text:p>
          </table:table-cell>
          <table:table-cell table:formula="of:=VLOOKUP([.I339];[$レアリティ番号.$A$1:$レアリティ番号.$B$4];2;0)" office:value-type="float" office:value="1" calcext:value-type="float">
            <text:p>1</text:p>
          </table:table-cell>
          <table:table-cell office:value-type="string" calcext:value-type="string">
            <text:p>イジン</text:p>
          </table:table-cell>
          <table:table-cell table:formula="of:=VLOOKUP([.K339];[$種類番号.$A$1:$種類番号.$B$4];2;0)" office:value-type="float" office:value="1" calcext:value-type="float">
            <text:p>1</text:p>
          </table:table-cell>
          <table:table-cell office:value-type="string" calcext:value-type="string">
            <text:p>黄</text:p>
          </table:table-cell>
          <table:table-cell table:formula="of:=VLOOKUP([.M339];[$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3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39];[$特性番号.$A$1:$特性番号.$B$8];2;0);0)" office:value-type="float" office:value="0" calcext:value-type="float">
            <text:p>0</text:p>
          </table:table-cell>
          <table:table-cell office:value-type="string" calcext:value-type="string">
            <text:p>これが戦場か墓地にいる間、手札のカードを墓地に置く効果を持つ、戦場の能力すべては、発動せず効果を発揮しない。</text:p>
          </table:table-cell>
          <table:table-cell table:style-name="ce8" office:value-type="string" calcext:value-type="string">
            <text:p>1ドローする</text:p>
          </table:table-cell>
          <table:table-cell table:formula="of:=IFERROR(VLOOKUP([.$V339];[$遺業能力番号.$A$1:$遺業能力番号.$B$9];2;0);0)" office:value-type="float" office:value="4" calcext:value-type="float">
            <text:p>4</text:p>
          </table:table-cell>
          <table:table-cell office:value-type="string" calcext:value-type="string">
            <text:p>https://one-draw.jp/ijinden/cardlist/004/card/04_030.png</text:p>
          </table:table-cell>
          <table:table-cell table:formula="of:=CONCATENATE([$JSON.$A$1];[.$C339];[$JSON.$B$1];[.$E339];[$JSON.$C$1];[.$F339];[$JSON.$D$1];IF(ISNA([.$S339]);&quot;null&quot;;&quot;&quot;&quot;&quot;&amp;[.$S339]&amp;&quot;&quot;&quot;&quot;);[$JSON.$E$1];[.$U339];[$JSON.$F$1];IF(ISNA([.$V339]);&quot;null&quot;;&quot;&quot;&quot;&quot;&amp;[.$V339]&amp;&quot;&quot;&quot;&quot;);[$JSON.$G$1];[.$X339];[$JSON.$H$1];[.$H339];[$JSON.$I$1];[.J339];[$JSON.$J$1];[.$L339];[$JSON.$K$1];[.$O339];[$JSON.$L$1];[.$N339];[$JSON.$M$1];[.$R339];[$JSON.$N$1];[.$T339];[$JSON.$O$1];[.$W339];[$JSON.$P$1];[.$A339];[$JSON.$Q$1];[.$B339];[$JSON.$R$1])" office:value-type="string" office:string-value="{&quot;id&quot;:&quot;4-30&quot;,&quot;name&quot;:&quot;新島八重&quot;,&quot;kana&quot;:&quot;にいじまやえ&quot;,&quot;traitText&quot;:null,&quot;ruleText&quot;:&quot;これが戦場か墓地にいる間、手札のカードを墓地に置く効果を持つ、戦場の能力すべては、発動せず効果を発揮しない。&quot;,&quot;legacyText&quot;:&quot;1ドローする&quot;,&quot;imageUrl&quot;:&quot;https://one-draw.jp/ijinden/cardlist/004/card/04_030.png&quot;,&quot;expansion&quot;:45,&quot;rarity&quot;:1,&quot;type&quot;:1,&quot;level&quot;:2,&quot;color&quot;:8,&quot;term&quot;:0,&quot;trait&quot;:0,&quot;legacy&quot;:4,&quot;orderTable&quot;:339,&quot;orderDeck&quot;:57}," calcext:value-type="string">
            <text:p>{"id":"4-30","name":"新島八重","kana":"にいじまやえ","traitText":null,"ruleText":"これが戦場か墓地にいる間、手札のカードを墓地に置く効果を持つ、戦場の能力すべては、発動せず効果を発揮しない。","legacyText":"1ドローする","imageUrl":"https://one-draw.jp/ijinden/cardlist/004/card/04_030.png","expansion":45,"rarity":1,"type":1,"level":2,"color":8,"term":0,"trait":0,"legacy":4,"orderTable":339,"orderDeck":57},</text:p>
          </table:table-cell>
          <table:table-cell table:number-columns-repeated="16347"/>
        </table:table-row>
        <table:table-row table:style-name="ro2">
          <table:table-cell office:value-type="float" office:value="340" calcext:value-type="float">
            <text:p>340</text:p>
          </table:table-cell>
          <table:table-cell office:value-type="float" office:value="176" calcext:value-type="float">
            <text:p>176</text:p>
          </table:table-cell>
          <table:table-cell office:value-type="string" calcext:value-type="string">
            <text:p>4-31</text:p>
          </table:table-cell>
          <table:table-cell office:value-type="float" office:value="31" calcext:value-type="float">
            <text:p>31</text:p>
          </table:table-cell>
          <table:table-cell office:value-type="string" calcext:value-type="string">
            <text:p>尾形光琳</text:p>
          </table:table-cell>
          <table:table-cell office:value-type="string" calcext:value-type="string">
            <text:p>おがたこうりん</text:p>
          </table:table-cell>
          <table:table-cell office:value-type="string" calcext:value-type="string">
            <text:p>第４弾ブースターパック</text:p>
          </table:table-cell>
          <table:table-cell table:formula="of:=VLOOKUP([.G340];[$収録番号.$A$1:$収録番号.$B$9];2;0)" office:value-type="float" office:value="45" calcext:value-type="float">
            <text:p>45</text:p>
          </table:table-cell>
          <table:table-cell office:value-type="string" calcext:value-type="string">
            <text:p>N</text:p>
          </table:table-cell>
          <table:table-cell table:formula="of:=VLOOKUP([.I340];[$レアリティ番号.$A$1:$レアリティ番号.$B$4];2;0)" office:value-type="float" office:value="1" calcext:value-type="float">
            <text:p>1</text:p>
          </table:table-cell>
          <table:table-cell office:value-type="string" calcext:value-type="string">
            <text:p>イジン</text:p>
          </table:table-cell>
          <table:table-cell table:formula="of:=VLOOKUP([.K340];[$種類番号.$A$1:$種類番号.$B$4];2;0)" office:value-type="float" office:value="1" calcext:value-type="float">
            <text:p>1</text:p>
          </table:table-cell>
          <table:table-cell office:value-type="string" calcext:value-type="string">
            <text:p>黄</text:p>
          </table:table-cell>
          <table:table-cell table:formula="of:=VLOOKUP([.M340];[$色番号.$A$1:$色番号.$B$10];2;0)" office:value-type="float" office:value="8" calcext:value-type="float">
            <text:p>8</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40];[$能力語番号.$A$1:$能力語番号.$B$10];2;0);0)" office:value-type="float" office:value="0" calcext:value-type="float">
            <text:p>0</text:p>
          </table:table-cell>
          <table:table-cell office:value-type="string" calcext:value-type="string">
            <text:p>美術</text:p>
          </table:table-cell>
          <table:table-cell table:formula="of:=IFERROR(VLOOKUP([.$S340];[$特性番号.$A$1:$特性番号.$B$8];2;0);0)" office:value-type="float" office:value="2" calcext:value-type="float">
            <text:p>2</text:p>
          </table:table-cell>
          <table:table-cell office:value-type="string" calcext:value-type="string">
            <text:p>戦場に置かれたとき、自分の魔力ゾーンの裏のカードで、表がレベル4以下のハイケイのもの1つを指定して発動できる。そのカードを表向きで戦場に置いて、相手の戦場のイジン1体を山札の下に戻して、イジン召喚権+1する。</text:p>
          </table:table-cell>
          <table:table-cell table:style-name="ce8" office:value-type="string" calcext:value-type="string">
            <text:p>1ドローする</text:p>
          </table:table-cell>
          <table:table-cell table:formula="of:=IFERROR(VLOOKUP([.$V340];[$遺業能力番号.$A$1:$遺業能力番号.$B$9];2;0);0)" office:value-type="float" office:value="4" calcext:value-type="float">
            <text:p>4</text:p>
          </table:table-cell>
          <table:table-cell office:value-type="string" calcext:value-type="string">
            <text:p>https://one-draw.jp/ijinden/cardlist/004/card/04_031.png</text:p>
          </table:table-cell>
          <table:table-cell table:formula="of:=CONCATENATE([$JSON.$A$1];[.$C340];[$JSON.$B$1];[.$E340];[$JSON.$C$1];[.$F340];[$JSON.$D$1];IF(ISNA([.$S340]);&quot;null&quot;;&quot;&quot;&quot;&quot;&amp;[.$S340]&amp;&quot;&quot;&quot;&quot;);[$JSON.$E$1];[.$U340];[$JSON.$F$1];IF(ISNA([.$V340]);&quot;null&quot;;&quot;&quot;&quot;&quot;&amp;[.$V340]&amp;&quot;&quot;&quot;&quot;);[$JSON.$G$1];[.$X340];[$JSON.$H$1];[.$H340];[$JSON.$I$1];[.J340];[$JSON.$J$1];[.$L340];[$JSON.$K$1];[.$O340];[$JSON.$L$1];[.$N340];[$JSON.$M$1];[.$R340];[$JSON.$N$1];[.$T340];[$JSON.$O$1];[.$W340];[$JSON.$P$1];[.$A340];[$JSON.$Q$1];[.$B340];[$JSON.$R$1])" office:value-type="string" office:string-value="{&quot;id&quot;:&quot;4-31&quot;,&quot;name&quot;:&quot;尾形光琳&quot;,&quot;kana&quot;:&quot;おがたこうりん&quot;,&quot;traitText&quot;:&quot;美術&quot;,&quot;ruleText&quot;:&quot;戦場に置かれたとき、自分の魔力ゾーンの裏のカードで、表がレベル4以下のハイケイのもの1つを指定して発動できる。そのカードを表向きで戦場に置いて、相手の戦場のイジン1体を山札の下に戻して、イジン召喚権+1する。&quot;,&quot;legacyText&quot;:&quot;1ドローする&quot;,&quot;imageUrl&quot;:&quot;https://one-draw.jp/ijinden/cardlist/004/card/04_031.png&quot;,&quot;expansion&quot;:45,&quot;rarity&quot;:1,&quot;type&quot;:1,&quot;level&quot;:5,&quot;color&quot;:8,&quot;term&quot;:0,&quot;trait&quot;:2,&quot;legacy&quot;:4,&quot;orderTable&quot;:340,&quot;orderDeck&quot;:176}," calcext:value-type="string">
            <text:p>{"id":"4-31","name":"尾形光琳","kana":"おがたこうりん","traitText":"美術","ruleText":"戦場に置かれたとき、自分の魔力ゾーンの裏のカードで、表がレベル4以下のハイケイのもの1つを指定して発動できる。そのカードを表向きで戦場に置いて、相手の戦場のイジン1体を山札の下に戻して、イジン召喚権+1する。","legacyText":"1ドローする","imageUrl":"https://one-draw.jp/ijinden/cardlist/004/card/04_031.png","expansion":45,"rarity":1,"type":1,"level":5,"color":8,"term":0,"trait":2,"legacy":4,"orderTable":340,"orderDeck":176},</text:p>
          </table:table-cell>
          <table:table-cell table:number-columns-repeated="16347"/>
        </table:table-row>
        <table:table-row table:style-name="ro2">
          <table:table-cell office:value-type="float" office:value="341" calcext:value-type="float">
            <text:p>341</text:p>
          </table:table-cell>
          <table:table-cell office:value-type="float" office:value="100" calcext:value-type="float">
            <text:p>100</text:p>
          </table:table-cell>
          <table:table-cell office:value-type="string" calcext:value-type="string">
            <text:p>4-32</text:p>
          </table:table-cell>
          <table:table-cell office:value-type="float" office:value="32" calcext:value-type="float">
            <text:p>32</text:p>
          </table:table-cell>
          <table:table-cell office:value-type="string" calcext:value-type="string">
            <text:p>滝沢馬琴</text:p>
          </table:table-cell>
          <table:table-cell office:value-type="string" calcext:value-type="string">
            <text:p>たきざわばきん</text:p>
          </table:table-cell>
          <table:table-cell office:value-type="string" calcext:value-type="string">
            <text:p>第４弾ブースターパック</text:p>
          </table:table-cell>
          <table:table-cell table:formula="of:=VLOOKUP([.G341];[$収録番号.$A$1:$収録番号.$B$9];2;0)" office:value-type="float" office:value="45" calcext:value-type="float">
            <text:p>45</text:p>
          </table:table-cell>
          <table:table-cell office:value-type="string" calcext:value-type="string">
            <text:p>N</text:p>
          </table:table-cell>
          <table:table-cell table:formula="of:=VLOOKUP([.I341];[$レアリティ番号.$A$1:$レアリティ番号.$B$4];2;0)" office:value-type="float" office:value="1" calcext:value-type="float">
            <text:p>1</text:p>
          </table:table-cell>
          <table:table-cell office:value-type="string" calcext:value-type="string">
            <text:p>イジン</text:p>
          </table:table-cell>
          <table:table-cell table:formula="of:=VLOOKUP([.K341];[$種類番号.$A$1:$種類番号.$B$4];2;0)" office:value-type="float" office:value="1" calcext:value-type="float">
            <text:p>1</text:p>
          </table:table-cell>
          <table:table-cell office:value-type="string" calcext:value-type="string">
            <text:p>黄</text:p>
          </table:table-cell>
          <table:table-cell table:formula="of:=VLOOKUP([.M341];[$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執筆</text:p>
          </table:table-cell>
          <table:table-cell table:formula="of:=IFERROR(VLOOKUP([.$Q341];[$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341];[$特性番号.$A$1:$特性番号.$B$8];2;0);0)" office:value-type="float" office:value="0" calcext:value-type="float">
            <text:p>0</text:p>
          </table:table-cell>
          <table:table-cell office:value-type="string" calcext:value-type="string">
            <text:p>執筆 - 黄のハイケイが戦場に置かれるたび、1ドローする。</text:p>
          </table:table-cell>
          <table:table-cell table:style-name="ce8" office:value-type="string" calcext:value-type="string">
            <text:p>1ドローする</text:p>
          </table:table-cell>
          <table:table-cell table:formula="of:=IFERROR(VLOOKUP([.$V341];[$遺業能力番号.$A$1:$遺業能力番号.$B$9];2;0);0)" office:value-type="float" office:value="4" calcext:value-type="float">
            <text:p>4</text:p>
          </table:table-cell>
          <table:table-cell office:value-type="string" calcext:value-type="string">
            <text:p>https://one-draw.jp/ijinden/cardlist/004/card/04_032.png</text:p>
          </table:table-cell>
          <table:table-cell table:formula="of:=CONCATENATE([$JSON.$A$1];[.$C341];[$JSON.$B$1];[.$E341];[$JSON.$C$1];[.$F341];[$JSON.$D$1];IF(ISNA([.$S341]);&quot;null&quot;;&quot;&quot;&quot;&quot;&amp;[.$S341]&amp;&quot;&quot;&quot;&quot;);[$JSON.$E$1];[.$U341];[$JSON.$F$1];IF(ISNA([.$V341]);&quot;null&quot;;&quot;&quot;&quot;&quot;&amp;[.$V341]&amp;&quot;&quot;&quot;&quot;);[$JSON.$G$1];[.$X341];[$JSON.$H$1];[.$H341];[$JSON.$I$1];[.J341];[$JSON.$J$1];[.$L341];[$JSON.$K$1];[.$O341];[$JSON.$L$1];[.$N341];[$JSON.$M$1];[.$R341];[$JSON.$N$1];[.$T341];[$JSON.$O$1];[.$W341];[$JSON.$P$1];[.$A341];[$JSON.$Q$1];[.$B341];[$JSON.$R$1])" office:value-type="string" office:string-value="{&quot;id&quot;:&quot;4-32&quot;,&quot;name&quot;:&quot;滝沢馬琴&quot;,&quot;kana&quot;:&quot;たきざわばきん&quot;,&quot;traitText&quot;:null,&quot;ruleText&quot;:&quot;執筆 - 黄のハイケイが戦場に置かれるたび、1ドローする。&quot;,&quot;legacyText&quot;:&quot;1ドローする&quot;,&quot;imageUrl&quot;:&quot;https://one-draw.jp/ijinden/cardlist/004/card/04_032.png&quot;,&quot;expansion&quot;:45,&quot;rarity&quot;:1,&quot;type&quot;:1,&quot;level&quot;:3,&quot;color&quot;:8,&quot;term&quot;:2,&quot;trait&quot;:0,&quot;legacy&quot;:4,&quot;orderTable&quot;:341,&quot;orderDeck&quot;:100}," calcext:value-type="string">
            <text:p>{"id":"4-32","name":"滝沢馬琴","kana":"たきざわばきん","traitText":null,"ruleText":"執筆 - 黄のハイケイが戦場に置かれるたび、1ドローする。","legacyText":"1ドローする","imageUrl":"https://one-draw.jp/ijinden/cardlist/004/card/04_032.png","expansion":45,"rarity":1,"type":1,"level":3,"color":8,"term":2,"trait":0,"legacy":4,"orderTable":341,"orderDeck":100},</text:p>
          </table:table-cell>
          <table:table-cell table:number-columns-repeated="16347"/>
        </table:table-row>
        <table:table-row table:style-name="ro2">
          <table:table-cell office:value-type="float" office:value="342" calcext:value-type="float">
            <text:p>342</text:p>
          </table:table-cell>
          <table:table-cell office:value-type="float" office:value="199" calcext:value-type="float">
            <text:p>199</text:p>
          </table:table-cell>
          <table:table-cell office:value-type="string" calcext:value-type="string">
            <text:p>4-33</text:p>
          </table:table-cell>
          <table:table-cell office:value-type="float" office:value="33" calcext:value-type="float">
            <text:p>33</text:p>
          </table:table-cell>
          <table:table-cell office:value-type="string" calcext:value-type="string">
            <text:p>メアリー・ゴドウィン・シェリー</text:p>
          </table:table-cell>
          <table:table-cell office:value-type="string" calcext:value-type="string">
            <text:p>めありーごどうぃんしぇりー</text:p>
          </table:table-cell>
          <table:table-cell office:value-type="string" calcext:value-type="string">
            <text:p>第４弾ブースターパック</text:p>
          </table:table-cell>
          <table:table-cell table:formula="of:=VLOOKUP([.G342];[$収録番号.$A$1:$収録番号.$B$9];2;0)" office:value-type="float" office:value="45" calcext:value-type="float">
            <text:p>45</text:p>
          </table:table-cell>
          <table:table-cell office:value-type="string" calcext:value-type="string">
            <text:p>R</text:p>
          </table:table-cell>
          <table:table-cell table:formula="of:=VLOOKUP([.I342];[$レアリティ番号.$A$1:$レアリティ番号.$B$4];2;0)" office:value-type="float" office:value="2" calcext:value-type="float">
            <text:p>2</text:p>
          </table:table-cell>
          <table:table-cell office:value-type="string" calcext:value-type="string">
            <text:p>イジン</text:p>
          </table:table-cell>
          <table:table-cell table:formula="of:=VLOOKUP([.K342];[$種類番号.$A$1:$種類番号.$B$4];2;0)" office:value-type="float" office:value="1" calcext:value-type="float">
            <text:p>1</text:p>
          </table:table-cell>
          <table:table-cell office:value-type="string" calcext:value-type="string">
            <text:p>黄</text:p>
          </table:table-cell>
          <table:table-cell table:formula="of:=VLOOKUP([.M342];[$色番号.$A$1:$色番号.$B$10];2;0)" office:value-type="float" office:value="8" calcext:value-type="float">
            <text:p>8</text:p>
          </table:table-cell>
          <table:table-cell office:value-type="float" office:value="6" calcext:value-type="float">
            <text:p>6</text:p>
          </table:table-cell>
          <table:table-cell table:formula="of:=NA()" office:value-type="string" office:string-value="" calcext:value-type="error">
            <text:p>#N/A</text:p>
          </table:table-cell>
          <table:table-cell office:value-type="string" calcext:value-type="string">
            <text:p>執筆</text:p>
          </table:table-cell>
          <table:table-cell table:formula="of:=IFERROR(VLOOKUP([.$Q342];[$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342];[$特性番号.$A$1:$特性番号.$B$8];2;0);0)" office:value-type="float" office:value="0" calcext:value-type="float">
            <text:p>0</text:p>
          </table:table-cell>
          <table:table-cell office:value-type="string" calcext:value-type="string">
            <text:p>これのイジン召喚に際し、これのレベルは、墓地のイジン1体につき1だけ下がる。¶執筆 - この能力はターンに1回しか発動しない。ハイケイが戦場に置かれたとき、戦場のハイケイ1つを指定して発動できる。その指定されたハイケイと、相手の戦場のパワー5000以下のイジン1体を破壊する。</text:p>
          </table:table-cell>
          <table:table-cell table:style-name="ce8" office:value-type="string" calcext:value-type="string">
            <text:p>木霊</text:p>
          </table:table-cell>
          <table:table-cell table:formula="of:=IFERROR(VLOOKUP([.$V342];[$遺業能力番号.$A$1:$遺業能力番号.$B$9];2;0);0)" office:value-type="float" office:value="8" calcext:value-type="float">
            <text:p>8</text:p>
          </table:table-cell>
          <table:table-cell office:value-type="string" calcext:value-type="string">
            <text:p>https://one-draw.jp/ijinden/cardlist/004/card/04_033.png</text:p>
          </table:table-cell>
          <table:table-cell table:formula="of:=CONCATENATE([$JSON.$A$1];[.$C342];[$JSON.$B$1];[.$E342];[$JSON.$C$1];[.$F342];[$JSON.$D$1];IF(ISNA([.$S342]);&quot;null&quot;;&quot;&quot;&quot;&quot;&amp;[.$S342]&amp;&quot;&quot;&quot;&quot;);[$JSON.$E$1];[.$U342];[$JSON.$F$1];IF(ISNA([.$V342]);&quot;null&quot;;&quot;&quot;&quot;&quot;&amp;[.$V342]&amp;&quot;&quot;&quot;&quot;);[$JSON.$G$1];[.$X342];[$JSON.$H$1];[.$H342];[$JSON.$I$1];[.J342];[$JSON.$J$1];[.$L342];[$JSON.$K$1];[.$O342];[$JSON.$L$1];[.$N342];[$JSON.$M$1];[.$R342];[$JSON.$N$1];[.$T342];[$JSON.$O$1];[.$W342];[$JSON.$P$1];[.$A342];[$JSON.$Q$1];[.$B342];[$JSON.$R$1])" office:value-type="string" office:string-value="{&quot;id&quot;:&quot;4-33&quot;,&quot;name&quot;:&quot;メアリー・ゴドウィン・シェリー&quot;,&quot;kana&quot;:&quot;めありーごどうぃんしぇりー&quot;,&quot;traitText&quot;:null,&quot;ruleText&quot;:&quot;これのイジン召喚に際し、これのレベルは、墓地のイジン1体につき1だけ下がる。¶執筆 - この能力はターンに1回しか発動しない。ハイケイが戦場に置かれたとき、戦場のハイケイ1つを指定して発動できる。その指定されたハイケイと、相手の戦場のパワー5000以下のイジン1体を破壊する。&quot;,&quot;legacyText&quot;:&quot;木霊&quot;,&quot;imageUrl&quot;:&quot;https://one-draw.jp/ijinden/cardlist/004/card/04_033.png&quot;,&quot;expansion&quot;:45,&quot;rarity&quot;:2,&quot;type&quot;:1,&quot;level&quot;:6,&quot;color&quot;:8,&quot;term&quot;:2,&quot;trait&quot;:0,&quot;legacy&quot;:8,&quot;orderTable&quot;:342,&quot;orderDeck&quot;:199}," calcext:value-type="string">
            <text:p>{"id":"4-33","name":"メアリー・ゴドウィン・シェリー","kana":"めありーごどうぃんしぇりー","traitText":null,"ruleText":"これのイジン召喚に際し、これのレベルは、墓地のイジン1体につき1だけ下がる。¶執筆 - この能力はターンに1回しか発動しない。ハイケイが戦場に置かれたとき、戦場のハイケイ1つを指定して発動できる。その指定されたハイケイと、相手の戦場のパワー5000以下のイジン1体を破壊する。","legacyText":"木霊","imageUrl":"https://one-draw.jp/ijinden/cardlist/004/card/04_033.png","expansion":45,"rarity":2,"type":1,"level":6,"color":8,"term":2,"trait":0,"legacy":8,"orderTable":342,"orderDeck":199},</text:p>
          </table:table-cell>
          <table:table-cell table:number-columns-repeated="16347"/>
        </table:table-row>
        <table:table-row table:style-name="ro2">
          <table:table-cell office:value-type="float" office:value="343" calcext:value-type="float">
            <text:p>343</text:p>
          </table:table-cell>
          <table:table-cell office:value-type="float" office:value="138" calcext:value-type="float">
            <text:p>138</text:p>
          </table:table-cell>
          <table:table-cell office:value-type="string" calcext:value-type="string">
            <text:p>4-34</text:p>
          </table:table-cell>
          <table:table-cell office:value-type="float" office:value="34" calcext:value-type="float">
            <text:p>34</text:p>
          </table:table-cell>
          <table:table-cell office:value-type="string" calcext:value-type="string">
            <text:p>西郷頼母</text:p>
          </table:table-cell>
          <table:table-cell office:value-type="string" calcext:value-type="string">
            <text:p>さいごうたのも</text:p>
          </table:table-cell>
          <table:table-cell office:value-type="string" calcext:value-type="string">
            <text:p>第４弾ブースターパック</text:p>
          </table:table-cell>
          <table:table-cell table:formula="of:=VLOOKUP([.G343];[$収録番号.$A$1:$収録番号.$B$9];2;0)" office:value-type="float" office:value="45" calcext:value-type="float">
            <text:p>45</text:p>
          </table:table-cell>
          <table:table-cell office:value-type="string" calcext:value-type="string">
            <text:p>N</text:p>
          </table:table-cell>
          <table:table-cell table:formula="of:=VLOOKUP([.I343];[$レアリティ番号.$A$1:$レアリティ番号.$B$4];2;0)" office:value-type="float" office:value="1" calcext:value-type="float">
            <text:p>1</text:p>
          </table:table-cell>
          <table:table-cell office:value-type="string" calcext:value-type="string">
            <text:p>イジン</text:p>
          </table:table-cell>
          <table:table-cell table:formula="of:=VLOOKUP([.K343];[$種類番号.$A$1:$種類番号.$B$4];2;0)" office:value-type="float" office:value="1" calcext:value-type="float">
            <text:p>1</text:p>
          </table:table-cell>
          <table:table-cell office:value-type="string" calcext:value-type="string">
            <text:p>黄</text:p>
          </table:table-cell>
          <table:table-cell table:formula="of:=VLOOKUP([.M343];[$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4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43];[$特性番号.$A$1:$特性番号.$B$8];2;0);0)" office:value-type="float" office:value="0" calcext:value-type="float">
            <text:p>0</text:p>
          </table:table-cell>
          <table:table-cell office:value-type="string" calcext:value-type="string">
            <text:p>ウォッチャー¶自分の戦場の他のイジンが破壊されるたびに発動する。このターンに限り「パワー+1000」を得る。</text:p>
          </table:table-cell>
          <table:table-cell table:style-name="ce8" office:value-type="string" calcext:value-type="string">
            <text:p>1ドローする</text:p>
          </table:table-cell>
          <table:table-cell table:formula="of:=IFERROR(VLOOKUP([.$V343];[$遺業能力番号.$A$1:$遺業能力番号.$B$9];2;0);0)" office:value-type="float" office:value="4" calcext:value-type="float">
            <text:p>4</text:p>
          </table:table-cell>
          <table:table-cell office:value-type="string" calcext:value-type="string">
            <text:p>https://one-draw.jp/ijinden/cardlist/004/card/04_034.png</text:p>
          </table:table-cell>
          <table:table-cell table:formula="of:=CONCATENATE([$JSON.$A$1];[.$C343];[$JSON.$B$1];[.$E343];[$JSON.$C$1];[.$F343];[$JSON.$D$1];IF(ISNA([.$S343]);&quot;null&quot;;&quot;&quot;&quot;&quot;&amp;[.$S343]&amp;&quot;&quot;&quot;&quot;);[$JSON.$E$1];[.$U343];[$JSON.$F$1];IF(ISNA([.$V343]);&quot;null&quot;;&quot;&quot;&quot;&quot;&amp;[.$V343]&amp;&quot;&quot;&quot;&quot;);[$JSON.$G$1];[.$X343];[$JSON.$H$1];[.$H343];[$JSON.$I$1];[.J343];[$JSON.$J$1];[.$L343];[$JSON.$K$1];[.$O343];[$JSON.$L$1];[.$N343];[$JSON.$M$1];[.$R343];[$JSON.$N$1];[.$T343];[$JSON.$O$1];[.$W343];[$JSON.$P$1];[.$A343];[$JSON.$Q$1];[.$B343];[$JSON.$R$1])" office:value-type="string" office:string-value="{&quot;id&quot;:&quot;4-34&quot;,&quot;name&quot;:&quot;西郷頼母&quot;,&quot;kana&quot;:&quot;さいごうたのも&quot;,&quot;traitText&quot;:null,&quot;ruleText&quot;:&quot;ウォッチャー¶自分の戦場の他のイジンが破壊されるたびに発動する。このターンに限り「パワー+1000」を得る。&quot;,&quot;legacyText&quot;:&quot;1ドローする&quot;,&quot;imageUrl&quot;:&quot;https://one-draw.jp/ijinden/cardlist/004/card/04_034.png&quot;,&quot;expansion&quot;:45,&quot;rarity&quot;:1,&quot;type&quot;:1,&quot;level&quot;:4,&quot;color&quot;:8,&quot;term&quot;:0,&quot;trait&quot;:0,&quot;legacy&quot;:4,&quot;orderTable&quot;:343,&quot;orderDeck&quot;:138}," calcext:value-type="string">
            <text:p>{"id":"4-34","name":"西郷頼母","kana":"さいごうたのも","traitText":null,"ruleText":"ウォッチャー¶自分の戦場の他のイジンが破壊されるたびに発動する。このターンに限り「パワー+1000」を得る。","legacyText":"1ドローする","imageUrl":"https://one-draw.jp/ijinden/cardlist/004/card/04_034.png","expansion":45,"rarity":1,"type":1,"level":4,"color":8,"term":0,"trait":0,"legacy":4,"orderTable":343,"orderDeck":138},</text:p>
          </table:table-cell>
          <table:table-cell table:number-columns-repeated="16347"/>
        </table:table-row>
        <table:table-row table:style-name="ro2">
          <table:table-cell office:value-type="float" office:value="344" calcext:value-type="float">
            <text:p>344</text:p>
          </table:table-cell>
          <table:table-cell office:value-type="float" office:value="61" calcext:value-type="float">
            <text:p>61</text:p>
          </table:table-cell>
          <table:table-cell office:value-type="string" calcext:value-type="string">
            <text:p>4-35</text:p>
          </table:table-cell>
          <table:table-cell office:value-type="float" office:value="35" calcext:value-type="float">
            <text:p>35</text:p>
          </table:table-cell>
          <table:table-cell office:value-type="string" calcext:value-type="string">
            <text:p>沖田総司</text:p>
          </table:table-cell>
          <table:table-cell office:value-type="string" calcext:value-type="string">
            <text:p>おきたそうじ</text:p>
          </table:table-cell>
          <table:table-cell office:value-type="string" calcext:value-type="string">
            <text:p>第４弾ブースターパック</text:p>
          </table:table-cell>
          <table:table-cell table:formula="of:=VLOOKUP([.G344];[$収録番号.$A$1:$収録番号.$B$9];2;0)" office:value-type="float" office:value="45" calcext:value-type="float">
            <text:p>45</text:p>
          </table:table-cell>
          <table:table-cell office:value-type="string" calcext:value-type="string">
            <text:p>R</text:p>
          </table:table-cell>
          <table:table-cell table:formula="of:=VLOOKUP([.I344];[$レアリティ番号.$A$1:$レアリティ番号.$B$4];2;0)" office:value-type="float" office:value="2" calcext:value-type="float">
            <text:p>2</text:p>
          </table:table-cell>
          <table:table-cell office:value-type="string" calcext:value-type="string">
            <text:p>イジン</text:p>
          </table:table-cell>
          <table:table-cell table:formula="of:=VLOOKUP([.K344];[$種類番号.$A$1:$種類番号.$B$4];2;0)" office:value-type="float" office:value="1" calcext:value-type="float">
            <text:p>1</text:p>
          </table:table-cell>
          <table:table-cell office:value-type="string" calcext:value-type="string">
            <text:p>紫</text:p>
          </table:table-cell>
          <table:table-cell table:formula="of:=VLOOKUP([.M344];[$色番号.$A$1:$色番号.$B$10];2;0)" office:value-type="float" office:value="16" calcext:value-type="float">
            <text:p>16</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44];[$能力語番号.$A$1:$能力語番号.$B$10];2;0);0)" office:value-type="float" office:value="0" calcext:value-type="float">
            <text:p>0</text:p>
          </table:table-cell>
          <table:table-cell office:value-type="string" calcext:value-type="string">
            <text:p>剣術 志願</text:p>
          </table:table-cell>
          <table:table-cell table:formula="of:=IFERROR(VLOOKUP([.$S344];[$特性番号.$A$1:$特性番号.$B$8];2;0);0)" office:value-type="float" office:value="33" calcext:value-type="float">
            <text:p>33</text:p>
          </table:table-cell>
          <table:table-cell office:value-type="string" calcext:value-type="string">
            <text:p>戦場に置かれたとき、ガーディアンが自分の戦場にいないなら、戦場のレベル5以上のイジン1体を指定して発動できる。そのイジンを破壊する。¶アタッカーになったとき、相手の山札の上から2枚を墓地に置く。</text:p>
          </table:table-cell>
          <table:table-cell table:style-name="ce8" office:value-type="string" calcext:value-type="string">
            <text:p>1ドローする</text:p>
          </table:table-cell>
          <table:table-cell table:formula="of:=IFERROR(VLOOKUP([.$V344];[$遺業能力番号.$A$1:$遺業能力番号.$B$9];2;0);0)" office:value-type="float" office:value="4" calcext:value-type="float">
            <text:p>4</text:p>
          </table:table-cell>
          <table:table-cell office:value-type="string" calcext:value-type="string">
            <text:p>https://one-draw.jp/ijinden/cardlist/004/card/04_035.png</text:p>
          </table:table-cell>
          <table:table-cell table:formula="of:=CONCATENATE([$JSON.$A$1];[.$C344];[$JSON.$B$1];[.$E344];[$JSON.$C$1];[.$F344];[$JSON.$D$1];IF(ISNA([.$S344]);&quot;null&quot;;&quot;&quot;&quot;&quot;&amp;[.$S344]&amp;&quot;&quot;&quot;&quot;);[$JSON.$E$1];[.$U344];[$JSON.$F$1];IF(ISNA([.$V344]);&quot;null&quot;;&quot;&quot;&quot;&quot;&amp;[.$V344]&amp;&quot;&quot;&quot;&quot;);[$JSON.$G$1];[.$X344];[$JSON.$H$1];[.$H344];[$JSON.$I$1];[.J344];[$JSON.$J$1];[.$L344];[$JSON.$K$1];[.$O344];[$JSON.$L$1];[.$N344];[$JSON.$M$1];[.$R344];[$JSON.$N$1];[.$T344];[$JSON.$O$1];[.$W344];[$JSON.$P$1];[.$A344];[$JSON.$Q$1];[.$B344];[$JSON.$R$1])" office:value-type="string" office:string-value="{&quot;id&quot;:&quot;4-35&quot;,&quot;name&quot;:&quot;沖田総司&quot;,&quot;kana&quot;:&quot;おきたそうじ&quot;,&quot;traitText&quot;:&quot;剣術 志願&quot;,&quot;ruleText&quot;:&quot;戦場に置かれたとき、ガーディアンが自分の戦場にいないなら、戦場のレベル5以上のイジン1体を指定して発動できる。そのイジンを破壊する。¶アタッカーになったとき、相手の山札の上から2枚を墓地に置く。&quot;,&quot;legacyText&quot;:&quot;1ドローする&quot;,&quot;imageUrl&quot;:&quot;https://one-draw.jp/ijinden/cardlist/004/card/04_035.png&quot;,&quot;expansion&quot;:45,&quot;rarity&quot;:2,&quot;type&quot;:1,&quot;level&quot;:2,&quot;color&quot;:16,&quot;term&quot;:0,&quot;trait&quot;:33,&quot;legacy&quot;:4,&quot;orderTable&quot;:344,&quot;orderDeck&quot;:61}," calcext:value-type="string">
            <text:p>{"id":"4-35","name":"沖田総司","kana":"おきたそうじ","traitText":"剣術 志願","ruleText":"戦場に置かれたとき、ガーディアンが自分の戦場にいないなら、戦場のレベル5以上のイジン1体を指定して発動できる。そのイジンを破壊する。¶アタッカーになったとき、相手の山札の上から2枚を墓地に置く。","legacyText":"1ドローする","imageUrl":"https://one-draw.jp/ijinden/cardlist/004/card/04_035.png","expansion":45,"rarity":2,"type":1,"level":2,"color":16,"term":0,"trait":33,"legacy":4,"orderTable":344,"orderDeck":61},</text:p>
          </table:table-cell>
          <table:table-cell table:number-columns-repeated="16347"/>
        </table:table-row>
        <table:table-row table:style-name="ro2">
          <table:table-cell office:value-type="float" office:value="345" calcext:value-type="float">
            <text:p>345</text:p>
          </table:table-cell>
          <table:table-cell office:value-type="float" office:value="23" calcext:value-type="float">
            <text:p>23</text:p>
          </table:table-cell>
          <table:table-cell office:value-type="string" calcext:value-type="string">
            <text:p>4-36</text:p>
          </table:table-cell>
          <table:table-cell office:value-type="float" office:value="36" calcext:value-type="float">
            <text:p>36</text:p>
          </table:table-cell>
          <table:table-cell office:value-type="string" calcext:value-type="string">
            <text:p>ジョバンニ＝ディ＝メディチ</text:p>
          </table:table-cell>
          <table:table-cell office:value-type="string" calcext:value-type="string">
            <text:p>じょばんにでぃめでぃち</text:p>
          </table:table-cell>
          <table:table-cell office:value-type="string" calcext:value-type="string">
            <text:p>第４弾ブースターパック</text:p>
          </table:table-cell>
          <table:table-cell table:formula="of:=VLOOKUP([.G345];[$収録番号.$A$1:$収録番号.$B$9];2;0)" office:value-type="float" office:value="45" calcext:value-type="float">
            <text:p>45</text:p>
          </table:table-cell>
          <table:table-cell office:value-type="string" calcext:value-type="string">
            <text:p>N</text:p>
          </table:table-cell>
          <table:table-cell table:formula="of:=VLOOKUP([.I345];[$レアリティ番号.$A$1:$レアリティ番号.$B$4];2;0)" office:value-type="float" office:value="1" calcext:value-type="float">
            <text:p>1</text:p>
          </table:table-cell>
          <table:table-cell office:value-type="string" calcext:value-type="string">
            <text:p>イジン</text:p>
          </table:table-cell>
          <table:table-cell table:formula="of:=VLOOKUP([.K345];[$種類番号.$A$1:$種類番号.$B$4];2;0)" office:value-type="float" office:value="1" calcext:value-type="float">
            <text:p>1</text:p>
          </table:table-cell>
          <table:table-cell office:value-type="string" calcext:value-type="string">
            <text:p>紫</text:p>
          </table:table-cell>
          <table:table-cell table:formula="of:=VLOOKUP([.M345];[$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4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45];[$特性番号.$A$1:$特性番号.$B$8];2;0);0)" office:value-type="float" office:value="0" calcext:value-type="float">
            <text:p>0</text:p>
          </table:table-cell>
          <table:table-cell office:value-type="string" calcext:value-type="string">
            <text:p>戦場に置かれたとき、自分の山札の上から1枚を裏のまま魔力ゾーンに置いて、2ドローする。¶戦場から墓地に置かれたとき、カードが自分の墓地に5つ以上あるなら、ゲームに敗北する。</text:p>
          </table:table-cell>
          <table:table-cell table:style-name="ce8" table:formula="of:=NA()" office:value-type="string" office:string-value="" calcext:value-type="error">
            <text:p>#N/A</text:p>
          </table:table-cell>
          <table:table-cell table:formula="of:=IFERROR(VLOOKUP([.$V345];[$遺業能力番号.$A$1:$遺業能力番号.$B$9];2;0);0)" office:value-type="float" office:value="0" calcext:value-type="float">
            <text:p>0</text:p>
          </table:table-cell>
          <table:table-cell office:value-type="string" calcext:value-type="string">
            <text:p>https://one-draw.jp/ijinden/cardlist/004/card/04_036.png</text:p>
          </table:table-cell>
          <table:table-cell table:formula="of:=CONCATENATE([$JSON.$A$1];[.$C345];[$JSON.$B$1];[.$E345];[$JSON.$C$1];[.$F345];[$JSON.$D$1];IF(ISNA([.$S345]);&quot;null&quot;;&quot;&quot;&quot;&quot;&amp;[.$S345]&amp;&quot;&quot;&quot;&quot;);[$JSON.$E$1];[.$U345];[$JSON.$F$1];IF(ISNA([.$V345]);&quot;null&quot;;&quot;&quot;&quot;&quot;&amp;[.$V345]&amp;&quot;&quot;&quot;&quot;);[$JSON.$G$1];[.$X345];[$JSON.$H$1];[.$H345];[$JSON.$I$1];[.J345];[$JSON.$J$1];[.$L345];[$JSON.$K$1];[.$O345];[$JSON.$L$1];[.$N345];[$JSON.$M$1];[.$R345];[$JSON.$N$1];[.$T345];[$JSON.$O$1];[.$W345];[$JSON.$P$1];[.$A345];[$JSON.$Q$1];[.$B345];[$JSON.$R$1])" office:value-type="string" office:string-value="{&quot;id&quot;:&quot;4-36&quot;,&quot;name&quot;:&quot;ジョバンニ＝ディ＝メディチ&quot;,&quot;kana&quot;:&quot;じょばんにでぃめでぃち&quot;,&quot;traitText&quot;:null,&quot;ruleText&quot;:&quot;戦場に置かれたとき、自分の山札の上から1枚を裏のまま魔力ゾーンに置いて、2ドローする。¶戦場から墓地に置かれたとき、カードが自分の墓地に5つ以上あるなら、ゲームに敗北する。&quot;,&quot;legacyText&quot;:null,&quot;imageUrl&quot;:&quot;https://one-draw.jp/ijinden/cardlist/004/card/04_036.png&quot;,&quot;expansion&quot;:45,&quot;rarity&quot;:1,&quot;type&quot;:1,&quot;level&quot;:1,&quot;color&quot;:16,&quot;term&quot;:0,&quot;trait&quot;:0,&quot;legacy&quot;:0,&quot;orderTable&quot;:345,&quot;orderDeck&quot;:23}," calcext:value-type="string">
            <text:p>{"id":"4-36","name":"ジョバンニ＝ディ＝メディチ","kana":"じょばんにでぃめでぃち","traitText":null,"ruleText":"戦場に置かれたとき、自分の山札の上から1枚を裏のまま魔力ゾーンに置いて、2ドローする。¶戦場から墓地に置かれたとき、カードが自分の墓地に5つ以上あるなら、ゲームに敗北する。","legacyText":null,"imageUrl":"https://one-draw.jp/ijinden/cardlist/004/card/04_036.png","expansion":45,"rarity":1,"type":1,"level":1,"color":16,"term":0,"trait":0,"legacy":0,"orderTable":345,"orderDeck":23},</text:p>
          </table:table-cell>
          <table:table-cell table:number-columns-repeated="16347"/>
        </table:table-row>
        <table:table-row table:style-name="ro2">
          <table:table-cell office:value-type="float" office:value="346" calcext:value-type="float">
            <text:p>346</text:p>
          </table:table-cell>
          <table:table-cell office:value-type="float" office:value="62" calcext:value-type="float">
            <text:p>62</text:p>
          </table:table-cell>
          <table:table-cell office:value-type="string" calcext:value-type="string">
            <text:p>4-37</text:p>
          </table:table-cell>
          <table:table-cell office:value-type="float" office:value="37" calcext:value-type="float">
            <text:p>37</text:p>
          </table:table-cell>
          <table:table-cell office:value-type="string" calcext:value-type="string">
            <text:p>フローレンス・ナイチンゲール</text:p>
          </table:table-cell>
          <table:table-cell office:value-type="string" calcext:value-type="string">
            <text:p>ふろーれんすないちんげーる</text:p>
          </table:table-cell>
          <table:table-cell office:value-type="string" calcext:value-type="string">
            <text:p>第４弾ブースターパック</text:p>
          </table:table-cell>
          <table:table-cell table:formula="of:=VLOOKUP([.G346];[$収録番号.$A$1:$収録番号.$B$9];2;0)" office:value-type="float" office:value="45" calcext:value-type="float">
            <text:p>45</text:p>
          </table:table-cell>
          <table:table-cell office:value-type="string" calcext:value-type="string">
            <text:p>R</text:p>
          </table:table-cell>
          <table:table-cell table:formula="of:=VLOOKUP([.I346];[$レアリティ番号.$A$1:$レアリティ番号.$B$4];2;0)" office:value-type="float" office:value="2" calcext:value-type="float">
            <text:p>2</text:p>
          </table:table-cell>
          <table:table-cell office:value-type="string" calcext:value-type="string">
            <text:p>イジン</text:p>
          </table:table-cell>
          <table:table-cell table:formula="of:=VLOOKUP([.K346];[$種類番号.$A$1:$種類番号.$B$4];2;0)" office:value-type="float" office:value="1" calcext:value-type="float">
            <text:p>1</text:p>
          </table:table-cell>
          <table:table-cell office:value-type="string" calcext:value-type="string">
            <text:p>紫</text:p>
          </table:table-cell>
          <table:table-cell table:formula="of:=VLOOKUP([.M346];[$色番号.$A$1:$色番号.$B$10];2;0)" office:value-type="float" office:value="16" calcext:value-type="float">
            <text:p>16</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46];[$能力語番号.$A$1:$能力語番号.$B$10];2;0);0)" office:value-type="float" office:value="0" calcext:value-type="float">
            <text:p>0</text:p>
          </table:table-cell>
          <table:table-cell office:value-type="string" calcext:value-type="string">
            <text:p>医術</text:p>
          </table:table-cell>
          <table:table-cell table:formula="of:=IFERROR(VLOOKUP([.$S346];[$特性番号.$A$1:$特性番号.$B$8];2;0);0)" office:value-type="float" office:value="16" calcext:value-type="float">
            <text:p>16</text:p>
          </table:table-cell>
          <table:table-cell office:value-type="string" calcext:value-type="string">
            <text:p>墓地から戦場に置かれたとき、自分の山札の上から1枚を裏のまま戦場に置く。</text:p>
          </table:table-cell>
          <table:table-cell table:style-name="ce8" office:value-type="string" calcext:value-type="string">
            <text:p>反魂</text:p>
          </table:table-cell>
          <table:table-cell table:formula="of:=IFERROR(VLOOKUP([.$V346];[$遺業能力番号.$A$1:$遺業能力番号.$B$9];2;0);0)" office:value-type="float" office:value="6" calcext:value-type="float">
            <text:p>6</text:p>
          </table:table-cell>
          <table:table-cell office:value-type="string" calcext:value-type="string">
            <text:p>https://one-draw.jp/ijinden/cardlist/004/card/04_037.png</text:p>
          </table:table-cell>
          <table:table-cell table:formula="of:=CONCATENATE([$JSON.$A$1];[.$C346];[$JSON.$B$1];[.$E346];[$JSON.$C$1];[.$F346];[$JSON.$D$1];IF(ISNA([.$S346]);&quot;null&quot;;&quot;&quot;&quot;&quot;&amp;[.$S346]&amp;&quot;&quot;&quot;&quot;);[$JSON.$E$1];[.$U346];[$JSON.$F$1];IF(ISNA([.$V346]);&quot;null&quot;;&quot;&quot;&quot;&quot;&amp;[.$V346]&amp;&quot;&quot;&quot;&quot;);[$JSON.$G$1];[.$X346];[$JSON.$H$1];[.$H346];[$JSON.$I$1];[.J346];[$JSON.$J$1];[.$L346];[$JSON.$K$1];[.$O346];[$JSON.$L$1];[.$N346];[$JSON.$M$1];[.$R346];[$JSON.$N$1];[.$T346];[$JSON.$O$1];[.$W346];[$JSON.$P$1];[.$A346];[$JSON.$Q$1];[.$B346];[$JSON.$R$1])" office:value-type="string" office:string-value="{&quot;id&quot;:&quot;4-37&quot;,&quot;name&quot;:&quot;フローレンス・ナイチンゲール&quot;,&quot;kana&quot;:&quot;ふろーれんすないちんげーる&quot;,&quot;traitText&quot;:&quot;医術&quot;,&quot;ruleText&quot;:&quot;墓地から戦場に置かれたとき、自分の山札の上から1枚を裏のまま戦場に置く。&quot;,&quot;legacyText&quot;:&quot;反魂&quot;,&quot;imageUrl&quot;:&quot;https://one-draw.jp/ijinden/cardlist/004/card/04_037.png&quot;,&quot;expansion&quot;:45,&quot;rarity&quot;:2,&quot;type&quot;:1,&quot;level&quot;:2,&quot;color&quot;:16,&quot;term&quot;:0,&quot;trait&quot;:16,&quot;legacy&quot;:6,&quot;orderTable&quot;:346,&quot;orderDeck&quot;:62}," calcext:value-type="string">
            <text:p>{"id":"4-37","name":"フローレンス・ナイチンゲール","kana":"ふろーれんすないちんげーる","traitText":"医術","ruleText":"墓地から戦場に置かれたとき、自分の山札の上から1枚を裏のまま戦場に置く。","legacyText":"反魂","imageUrl":"https://one-draw.jp/ijinden/cardlist/004/card/04_037.png","expansion":45,"rarity":2,"type":1,"level":2,"color":16,"term":0,"trait":16,"legacy":6,"orderTable":346,"orderDeck":62},</text:p>
          </table:table-cell>
          <table:table-cell table:number-columns-repeated="16347"/>
        </table:table-row>
        <table:table-row table:style-name="ro2">
          <table:table-cell office:value-type="float" office:value="347" calcext:value-type="float">
            <text:p>347</text:p>
          </table:table-cell>
          <table:table-cell office:value-type="float" office:value="179" calcext:value-type="float">
            <text:p>179</text:p>
          </table:table-cell>
          <table:table-cell office:value-type="string" calcext:value-type="string">
            <text:p>4-38</text:p>
          </table:table-cell>
          <table:table-cell office:value-type="float" office:value="38" calcext:value-type="float">
            <text:p>38</text:p>
          </table:table-cell>
          <table:table-cell office:value-type="string" calcext:value-type="string">
            <text:p>ミシェル・ノストラダムス</text:p>
          </table:table-cell>
          <table:table-cell office:value-type="string" calcext:value-type="string">
            <text:p>みしぇるのすとらだむす</text:p>
          </table:table-cell>
          <table:table-cell office:value-type="string" calcext:value-type="string">
            <text:p>第４弾ブースターパック</text:p>
          </table:table-cell>
          <table:table-cell table:formula="of:=VLOOKUP([.G347];[$収録番号.$A$1:$収録番号.$B$9];2;0)" office:value-type="float" office:value="45" calcext:value-type="float">
            <text:p>45</text:p>
          </table:table-cell>
          <table:table-cell office:value-type="string" calcext:value-type="string">
            <text:p>N</text:p>
          </table:table-cell>
          <table:table-cell table:formula="of:=VLOOKUP([.I347];[$レアリティ番号.$A$1:$レアリティ番号.$B$4];2;0)" office:value-type="float" office:value="1" calcext:value-type="float">
            <text:p>1</text:p>
          </table:table-cell>
          <table:table-cell office:value-type="string" calcext:value-type="string">
            <text:p>イジン</text:p>
          </table:table-cell>
          <table:table-cell table:formula="of:=VLOOKUP([.K347];[$種類番号.$A$1:$種類番号.$B$4];2;0)" office:value-type="float" office:value="1" calcext:value-type="float">
            <text:p>1</text:p>
          </table:table-cell>
          <table:table-cell office:value-type="string" calcext:value-type="string">
            <text:p>紫</text:p>
          </table:table-cell>
          <table:table-cell table:formula="of:=VLOOKUP([.M347];[$色番号.$A$1:$色番号.$B$10];2;0)" office:value-type="float" office:value="16" calcext:value-type="float">
            <text:p>16</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47];[$能力語番号.$A$1:$能力語番号.$B$10];2;0);0)" office:value-type="float" office:value="0" calcext:value-type="float">
            <text:p>0</text:p>
          </table:table-cell>
          <table:table-cell office:value-type="string" calcext:value-type="string">
            <text:p>医術</text:p>
          </table:table-cell>
          <table:table-cell table:formula="of:=IFERROR(VLOOKUP([.$S347];[$特性番号.$A$1:$特性番号.$B$8];2;0);0)" office:value-type="float" office:value="16" calcext:value-type="float">
            <text:p>16</text:p>
          </table:table-cell>
          <table:table-cell office:value-type="string" calcext:value-type="string">
            <text:p>自分のエンドフェイズが開始したとき、カード名を1つ宣言して発動できる。相手の山札の上から1枚をめくって、そのカードの名前が宣言したカード名と同じなら、戦場のイジンすべてとハイケイすべてを山札に戻してシャッフルして、相手の山札の上から5枚を墓地に置く。</text:p>
          </table:table-cell>
          <table:table-cell table:style-name="ce8" office:value-type="string" calcext:value-type="string">
            <text:p>1ドローする</text:p>
          </table:table-cell>
          <table:table-cell table:formula="of:=IFERROR(VLOOKUP([.$V347];[$遺業能力番号.$A$1:$遺業能力番号.$B$9];2;0);0)" office:value-type="float" office:value="4" calcext:value-type="float">
            <text:p>4</text:p>
          </table:table-cell>
          <table:table-cell office:value-type="string" calcext:value-type="string">
            <text:p>https://one-draw.jp/ijinden/cardlist/004/card/04_038.png</text:p>
          </table:table-cell>
          <table:table-cell table:formula="of:=CONCATENATE([$JSON.$A$1];[.$C347];[$JSON.$B$1];[.$E347];[$JSON.$C$1];[.$F347];[$JSON.$D$1];IF(ISNA([.$S347]);&quot;null&quot;;&quot;&quot;&quot;&quot;&amp;[.$S347]&amp;&quot;&quot;&quot;&quot;);[$JSON.$E$1];[.$U347];[$JSON.$F$1];IF(ISNA([.$V347]);&quot;null&quot;;&quot;&quot;&quot;&quot;&amp;[.$V347]&amp;&quot;&quot;&quot;&quot;);[$JSON.$G$1];[.$X347];[$JSON.$H$1];[.$H347];[$JSON.$I$1];[.J347];[$JSON.$J$1];[.$L347];[$JSON.$K$1];[.$O347];[$JSON.$L$1];[.$N347];[$JSON.$M$1];[.$R347];[$JSON.$N$1];[.$T347];[$JSON.$O$1];[.$W347];[$JSON.$P$1];[.$A347];[$JSON.$Q$1];[.$B347];[$JSON.$R$1])" office:value-type="string" office:string-value="{&quot;id&quot;:&quot;4-38&quot;,&quot;name&quot;:&quot;ミシェル・ノストラダムス&quot;,&quot;kana&quot;:&quot;みしぇるのすとらだむす&quot;,&quot;traitText&quot;:&quot;医術&quot;,&quot;ruleText&quot;:&quot;自分のエンドフェイズが開始したとき、カード名を1つ宣言して発動できる。相手の山札の上から1枚をめくって、そのカードの名前が宣言したカード名と同じなら、戦場のイジンすべてとハイケイすべてを山札に戻してシャッフルして、相手の山札の上から5枚を墓地に置く。&quot;,&quot;legacyText&quot;:&quot;1ドローする&quot;,&quot;imageUrl&quot;:&quot;https://one-draw.jp/ijinden/cardlist/004/card/04_038.png&quot;,&quot;expansion&quot;:45,&quot;rarity&quot;:1,&quot;type&quot;:1,&quot;level&quot;:5,&quot;color&quot;:16,&quot;term&quot;:0,&quot;trait&quot;:16,&quot;legacy&quot;:4,&quot;orderTable&quot;:347,&quot;orderDeck&quot;:179}," calcext:value-type="string">
            <text:p>{"id":"4-38","name":"ミシェル・ノストラダムス","kana":"みしぇるのすとらだむす","traitText":"医術","ruleText":"自分のエンドフェイズが開始したとき、カード名を1つ宣言して発動できる。相手の山札の上から1枚をめくって、そのカードの名前が宣言したカード名と同じなら、戦場のイジンすべてとハイケイすべてを山札に戻してシャッフルして、相手の山札の上から5枚を墓地に置く。","legacyText":"1ドローする","imageUrl":"https://one-draw.jp/ijinden/cardlist/004/card/04_038.png","expansion":45,"rarity":1,"type":1,"level":5,"color":16,"term":0,"trait":16,"legacy":4,"orderTable":347,"orderDeck":179},</text:p>
          </table:table-cell>
          <table:table-cell table:number-columns-repeated="16347"/>
        </table:table-row>
        <table:table-row table:style-name="ro2">
          <table:table-cell office:value-type="float" office:value="348" calcext:value-type="float">
            <text:p>348</text:p>
          </table:table-cell>
          <table:table-cell office:value-type="float" office:value="105" calcext:value-type="float">
            <text:p>105</text:p>
          </table:table-cell>
          <table:table-cell office:value-type="string" calcext:value-type="string">
            <text:p>4-39</text:p>
          </table:table-cell>
          <table:table-cell office:value-type="float" office:value="39" calcext:value-type="float">
            <text:p>39</text:p>
          </table:table-cell>
          <table:table-cell office:value-type="string" calcext:value-type="string">
            <text:p>ヴィルヘルム・コンラート・レントゲン</text:p>
          </table:table-cell>
          <table:table-cell office:value-type="string" calcext:value-type="string">
            <text:p>ゔぃるへるむこんらーとれんとげん</text:p>
          </table:table-cell>
          <table:table-cell office:value-type="string" calcext:value-type="string">
            <text:p>第４弾ブースターパック</text:p>
          </table:table-cell>
          <table:table-cell table:formula="of:=VLOOKUP([.G348];[$収録番号.$A$1:$収録番号.$B$9];2;0)" office:value-type="float" office:value="45" calcext:value-type="float">
            <text:p>45</text:p>
          </table:table-cell>
          <table:table-cell office:value-type="string" calcext:value-type="string">
            <text:p>N</text:p>
          </table:table-cell>
          <table:table-cell table:formula="of:=VLOOKUP([.I348];[$レアリティ番号.$A$1:$レアリティ番号.$B$4];2;0)" office:value-type="float" office:value="1" calcext:value-type="float">
            <text:p>1</text:p>
          </table:table-cell>
          <table:table-cell office:value-type="string" calcext:value-type="string">
            <text:p>イジン</text:p>
          </table:table-cell>
          <table:table-cell table:formula="of:=VLOOKUP([.K348];[$種類番号.$A$1:$種類番号.$B$4];2;0)" office:value-type="float" office:value="1" calcext:value-type="float">
            <text:p>1</text:p>
          </table:table-cell>
          <table:table-cell office:value-type="string" calcext:value-type="string">
            <text:p>紫</text:p>
          </table:table-cell>
          <table:table-cell table:formula="of:=VLOOKUP([.M348];[$色番号.$A$1:$色番号.$B$10];2;0)" office:value-type="float" office:value="16" calcext:value-type="float">
            <text:p>16</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4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48];[$特性番号.$A$1:$特性番号.$B$8];2;0);0)" office:value-type="float" office:value="0" calcext:value-type="float">
            <text:p>0</text:p>
          </table:table-cell>
          <table:table-cell office:value-type="string" calcext:value-type="string">
            <text:p>戦場に置かれたとき、以下から1つを発動する。¶・戦場の寝ているイジン1体を指定して発動できる。そのイジンを破壊する。¶・自分か相手の山札の上から、イジンがでるまで1枚ずつめくって、めくったカードすべてを墓地に置く。</text:p>
          </table:table-cell>
          <table:table-cell table:style-name="ce8" table:formula="of:=NA()" office:value-type="string" office:string-value="" calcext:value-type="error">
            <text:p>#N/A</text:p>
          </table:table-cell>
          <table:table-cell table:formula="of:=IFERROR(VLOOKUP([.$V348];[$遺業能力番号.$A$1:$遺業能力番号.$B$9];2;0);0)" office:value-type="float" office:value="0" calcext:value-type="float">
            <text:p>0</text:p>
          </table:table-cell>
          <table:table-cell office:value-type="string" calcext:value-type="string">
            <text:p>https://one-draw.jp/ijinden/cardlist/004/card/04_039.png</text:p>
          </table:table-cell>
          <table:table-cell table:formula="of:=CONCATENATE([$JSON.$A$1];[.$C348];[$JSON.$B$1];[.$E348];[$JSON.$C$1];[.$F348];[$JSON.$D$1];IF(ISNA([.$S348]);&quot;null&quot;;&quot;&quot;&quot;&quot;&amp;[.$S348]&amp;&quot;&quot;&quot;&quot;);[$JSON.$E$1];[.$U348];[$JSON.$F$1];IF(ISNA([.$V348]);&quot;null&quot;;&quot;&quot;&quot;&quot;&amp;[.$V348]&amp;&quot;&quot;&quot;&quot;);[$JSON.$G$1];[.$X348];[$JSON.$H$1];[.$H348];[$JSON.$I$1];[.J348];[$JSON.$J$1];[.$L348];[$JSON.$K$1];[.$O348];[$JSON.$L$1];[.$N348];[$JSON.$M$1];[.$R348];[$JSON.$N$1];[.$T348];[$JSON.$O$1];[.$W348];[$JSON.$P$1];[.$A348];[$JSON.$Q$1];[.$B348];[$JSON.$R$1])" office:value-type="string" office:string-value="{&quot;id&quot;:&quot;4-39&quot;,&quot;name&quot;:&quot;ヴィルヘルム・コンラート・レントゲン&quot;,&quot;kana&quot;:&quot;ゔぃるへるむこんらーとれんとげん&quot;,&quot;traitText&quot;:null,&quot;ruleText&quot;:&quot;戦場に置かれたとき、以下から1つを発動する。¶・戦場の寝ているイジン1体を指定して発動できる。そのイジンを破壊する。¶・自分か相手の山札の上から、イジンがでるまで1枚ずつめくって、めくったカードすべてを墓地に置く。&quot;,&quot;legacyText&quot;:null,&quot;imageUrl&quot;:&quot;https://one-draw.jp/ijinden/cardlist/004/card/04_039.png&quot;,&quot;expansion&quot;:45,&quot;rarity&quot;:1,&quot;type&quot;:1,&quot;level&quot;:3,&quot;color&quot;:16,&quot;term&quot;:0,&quot;trait&quot;:0,&quot;legacy&quot;:0,&quot;orderTable&quot;:348,&quot;orderDeck&quot;:105}," calcext:value-type="string">
            <text:p>{"id":"4-39","name":"ヴィルヘルム・コンラート・レントゲン","kana":"ゔぃるへるむこんらーとれんとげん","traitText":null,"ruleText":"戦場に置かれたとき、以下から1つを発動する。¶・戦場の寝ているイジン1体を指定して発動できる。そのイジンを破壊する。¶・自分か相手の山札の上から、イジンがでるまで1枚ずつめくって、めくったカードすべてを墓地に置く。","legacyText":null,"imageUrl":"https://one-draw.jp/ijinden/cardlist/004/card/04_039.png","expansion":45,"rarity":1,"type":1,"level":3,"color":16,"term":0,"trait":0,"legacy":0,"orderTable":348,"orderDeck":105},</text:p>
          </table:table-cell>
          <table:table-cell table:number-columns-repeated="16347"/>
        </table:table-row>
        <table:table-row table:style-name="ro2">
          <table:table-cell office:value-type="float" office:value="349" calcext:value-type="float">
            <text:p>349</text:p>
          </table:table-cell>
          <table:table-cell office:value-type="float" office:value="202" calcext:value-type="float">
            <text:p>202</text:p>
          </table:table-cell>
          <table:table-cell office:value-type="string" calcext:value-type="string">
            <text:p>4-40</text:p>
          </table:table-cell>
          <table:table-cell office:value-type="float" office:value="40" calcext:value-type="float">
            <text:p>40</text:p>
          </table:table-cell>
          <table:table-cell office:value-type="string" calcext:value-type="string">
            <text:p>榎本武揚</text:p>
          </table:table-cell>
          <table:table-cell office:value-type="string" calcext:value-type="string">
            <text:p>えのもとたけあき</text:p>
          </table:table-cell>
          <table:table-cell office:value-type="string" calcext:value-type="string">
            <text:p>第４弾ブースターパック</text:p>
          </table:table-cell>
          <table:table-cell table:formula="of:=VLOOKUP([.G349];[$収録番号.$A$1:$収録番号.$B$9];2;0)" office:value-type="float" office:value="45" calcext:value-type="float">
            <text:p>45</text:p>
          </table:table-cell>
          <table:table-cell office:value-type="string" calcext:value-type="string">
            <text:p>N</text:p>
          </table:table-cell>
          <table:table-cell table:formula="of:=VLOOKUP([.I349];[$レアリティ番号.$A$1:$レアリティ番号.$B$4];2;0)" office:value-type="float" office:value="1" calcext:value-type="float">
            <text:p>1</text:p>
          </table:table-cell>
          <table:table-cell office:value-type="string" calcext:value-type="string">
            <text:p>イジン</text:p>
          </table:table-cell>
          <table:table-cell table:formula="of:=VLOOKUP([.K349];[$種類番号.$A$1:$種類番号.$B$4];2;0)" office:value-type="float" office:value="1" calcext:value-type="float">
            <text:p>1</text:p>
          </table:table-cell>
          <table:table-cell office:value-type="string" calcext:value-type="string">
            <text:p>紫</text:p>
          </table:table-cell>
          <table:table-cell table:formula="of:=VLOOKUP([.M349];[$色番号.$A$1:$色番号.$B$10];2;0)" office:value-type="float" office:value="16" calcext:value-type="float">
            <text:p>16</text:p>
          </table:table-cell>
          <table:table-cell office:value-type="float" office:value="6" calcext:value-type="float">
            <text:p>6</text:p>
          </table:table-cell>
          <table:table-cell table:formula="of:=NA()" office:value-type="string" office:string-value="" calcext:value-type="error">
            <text:p>#N/A</text:p>
          </table:table-cell>
          <table:table-cell office:value-type="string" calcext:value-type="string">
            <text:p>航海</text:p>
          </table:table-cell>
          <table:table-cell table:formula="of:=IFERROR(VLOOKUP([.$Q349];[$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349];[$特性番号.$A$1:$特性番号.$B$8];2;0);0)" office:value-type="float" office:value="0" calcext:value-type="float">
            <text:p>0</text:p>
          </table:table-cell>
          <table:table-cell office:value-type="string" calcext:value-type="string">
            <text:p>航海 - アタッカーになったとき「モータル」を持つイジンが自分の戦場にいるなら、相手の戦場のイジン1体かガーディアン1体を破壊する。そうでなければ、自分の戦場のイジン1体かガーディアン1体を手札に戻す。</text:p>
          </table:table-cell>
          <table:table-cell table:style-name="ce8" table:formula="of:=NA()" office:value-type="string" office:string-value="" calcext:value-type="error">
            <text:p>#N/A</text:p>
          </table:table-cell>
          <table:table-cell table:formula="of:=IFERROR(VLOOKUP([.$V349];[$遺業能力番号.$A$1:$遺業能力番号.$B$9];2;0);0)" office:value-type="float" office:value="0" calcext:value-type="float">
            <text:p>0</text:p>
          </table:table-cell>
          <table:table-cell office:value-type="string" calcext:value-type="string">
            <text:p>https://one-draw.jp/ijinden/cardlist/004/card/04_040.png</text:p>
          </table:table-cell>
          <table:table-cell table:formula="of:=CONCATENATE([$JSON.$A$1];[.$C349];[$JSON.$B$1];[.$E349];[$JSON.$C$1];[.$F349];[$JSON.$D$1];IF(ISNA([.$S349]);&quot;null&quot;;&quot;&quot;&quot;&quot;&amp;[.$S349]&amp;&quot;&quot;&quot;&quot;);[$JSON.$E$1];[.$U349];[$JSON.$F$1];IF(ISNA([.$V349]);&quot;null&quot;;&quot;&quot;&quot;&quot;&amp;[.$V349]&amp;&quot;&quot;&quot;&quot;);[$JSON.$G$1];[.$X349];[$JSON.$H$1];[.$H349];[$JSON.$I$1];[.J349];[$JSON.$J$1];[.$L349];[$JSON.$K$1];[.$O349];[$JSON.$L$1];[.$N349];[$JSON.$M$1];[.$R349];[$JSON.$N$1];[.$T349];[$JSON.$O$1];[.$W349];[$JSON.$P$1];[.$A349];[$JSON.$Q$1];[.$B349];[$JSON.$R$1])" office:value-type="string" office:string-value="{&quot;id&quot;:&quot;4-40&quot;,&quot;name&quot;:&quot;榎本武揚&quot;,&quot;kana&quot;:&quot;えのもとたけあき&quot;,&quot;traitText&quot;:null,&quot;ruleText&quot;:&quot;航海 - アタッカーになったとき「モータル」を持つイジンが自分の戦場にいるなら、相手の戦場のイジン1体かガーディアン1体を破壊する。そうでなければ、自分の戦場のイジン1体かガーディアン1体を手札に戻す。&quot;,&quot;legacyText&quot;:null,&quot;imageUrl&quot;:&quot;https://one-draw.jp/ijinden/cardlist/004/card/04_040.png&quot;,&quot;expansion&quot;:45,&quot;rarity&quot;:1,&quot;type&quot;:1,&quot;level&quot;:6,&quot;color&quot;:16,&quot;term&quot;:1,&quot;trait&quot;:0,&quot;legacy&quot;:0,&quot;orderTable&quot;:349,&quot;orderDeck&quot;:202}," calcext:value-type="string">
            <text:p>{"id":"4-40","name":"榎本武揚","kana":"えのもとたけあき","traitText":null,"ruleText":"航海 - アタッカーになったとき「モータル」を持つイジンが自分の戦場にいるなら、相手の戦場のイジン1体かガーディアン1体を破壊する。そうでなければ、自分の戦場のイジン1体かガーディアン1体を手札に戻す。","legacyText":null,"imageUrl":"https://one-draw.jp/ijinden/cardlist/004/card/04_040.png","expansion":45,"rarity":1,"type":1,"level":6,"color":16,"term":1,"trait":0,"legacy":0,"orderTable":349,"orderDeck":202},</text:p>
          </table:table-cell>
          <table:table-cell table:number-columns-repeated="16347"/>
        </table:table-row>
        <table:table-row table:style-name="ro2">
          <table:table-cell office:value-type="float" office:value="350" calcext:value-type="float">
            <text:p>350</text:p>
          </table:table-cell>
          <table:table-cell office:value-type="float" office:value="250" calcext:value-type="float">
            <text:p>250</text:p>
          </table:table-cell>
          <table:table-cell office:value-type="string" calcext:value-type="string">
            <text:p>4-41</text:p>
          </table:table-cell>
          <table:table-cell office:value-type="float" office:value="41" calcext:value-type="float">
            <text:p>41</text:p>
          </table:table-cell>
          <table:table-cell office:value-type="string" calcext:value-type="string">
            <text:p>無礼打</text:p>
          </table:table-cell>
          <table:table-cell office:value-type="string" calcext:value-type="string">
            <text:p>ぶれいうち</text:p>
          </table:table-cell>
          <table:table-cell office:value-type="string" calcext:value-type="string">
            <text:p>第４弾ブースターパック</text:p>
          </table:table-cell>
          <table:table-cell table:formula="of:=VLOOKUP([.G350];[$収録番号.$A$1:$収録番号.$B$9];2;0)" office:value-type="float" office:value="45" calcext:value-type="float">
            <text:p>45</text:p>
          </table:table-cell>
          <table:table-cell office:value-type="string" calcext:value-type="string">
            <text:p>N</text:p>
          </table:table-cell>
          <table:table-cell table:formula="of:=VLOOKUP([.I350];[$レアリティ番号.$A$1:$レアリティ番号.$B$4];2;0)" office:value-type="float" office:value="1" calcext:value-type="float">
            <text:p>1</text:p>
          </table:table-cell>
          <table:table-cell office:value-type="string" calcext:value-type="string">
            <text:p>ハイケイ</text:p>
          </table:table-cell>
          <table:table-cell table:formula="of:=VLOOKUP([.K350];[$種類番号.$A$1:$種類番号.$B$4];2;0)" office:value-type="float" office:value="2" calcext:value-type="float">
            <text:p>2</text:p>
          </table:table-cell>
          <table:table-cell office:value-type="string" calcext:value-type="string">
            <text:p>赤</text:p>
          </table:table-cell>
          <table:table-cell table:formula="of:=VLOOKUP([.M350];[$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5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50];[$特性番号.$A$1:$特性番号.$B$8];2;0);0)" office:value-type="float" office:value="0" calcext:value-type="float">
            <text:p>0</text:p>
          </table:table-cell>
          <table:table-cell office:value-type="string" calcext:value-type="string">
            <text:p>レベル2以下の赤でないイジンが戦場に置かれたときに発動できる。そのイジンを破壊して、これを墓地に置く。</text:p>
          </table:table-cell>
          <table:table-cell table:style-name="ce8" office:value-type="string" calcext:value-type="string">
            <text:p>1ドローする</text:p>
          </table:table-cell>
          <table:table-cell table:formula="of:=IFERROR(VLOOKUP([.$V350];[$遺業能力番号.$A$1:$遺業能力番号.$B$9];2;0);0)" office:value-type="float" office:value="4" calcext:value-type="float">
            <text:p>4</text:p>
          </table:table-cell>
          <table:table-cell office:value-type="string" calcext:value-type="string">
            <text:p>https://one-draw.jp/ijinden/cardlist/004/card/04_041.png</text:p>
          </table:table-cell>
          <table:table-cell table:formula="of:=CONCATENATE([$JSON.$A$1];[.$C350];[$JSON.$B$1];[.$E350];[$JSON.$C$1];[.$F350];[$JSON.$D$1];IF(ISNA([.$S350]);&quot;null&quot;;&quot;&quot;&quot;&quot;&amp;[.$S350]&amp;&quot;&quot;&quot;&quot;);[$JSON.$E$1];[.$U350];[$JSON.$F$1];IF(ISNA([.$V350]);&quot;null&quot;;&quot;&quot;&quot;&quot;&amp;[.$V350]&amp;&quot;&quot;&quot;&quot;);[$JSON.$G$1];[.$X350];[$JSON.$H$1];[.$H350];[$JSON.$I$1];[.J350];[$JSON.$J$1];[.$L350];[$JSON.$K$1];[.$O350];[$JSON.$L$1];[.$N350];[$JSON.$M$1];[.$R350];[$JSON.$N$1];[.$T350];[$JSON.$O$1];[.$W350];[$JSON.$P$1];[.$A350];[$JSON.$Q$1];[.$B350];[$JSON.$R$1])" office:value-type="string" office:string-value="{&quot;id&quot;:&quot;4-41&quot;,&quot;name&quot;:&quot;無礼打&quot;,&quot;kana&quot;:&quot;ぶれいうち&quot;,&quot;traitText&quot;:null,&quot;ruleText&quot;:&quot;レベル2以下の赤でないイジンが戦場に置かれたときに発動できる。そのイジンを破壊して、これを墓地に置く。&quot;,&quot;legacyText&quot;:&quot;1ドローする&quot;,&quot;imageUrl&quot;:&quot;https://one-draw.jp/ijinden/cardlist/004/card/04_041.png&quot;,&quot;expansion&quot;:45,&quot;rarity&quot;:1,&quot;type&quot;:2,&quot;level&quot;:3,&quot;color&quot;:1,&quot;term&quot;:0,&quot;trait&quot;:0,&quot;legacy&quot;:4,&quot;orderTable&quot;:350,&quot;orderDeck&quot;:250}," calcext:value-type="string">
            <text:p>{"id":"4-41","name":"無礼打","kana":"ぶれいうち","traitText":null,"ruleText":"レベル2以下の赤でないイジンが戦場に置かれたときに発動できる。そのイジンを破壊して、これを墓地に置く。","legacyText":"1ドローする","imageUrl":"https://one-draw.jp/ijinden/cardlist/004/card/04_041.png","expansion":45,"rarity":1,"type":2,"level":3,"color":1,"term":0,"trait":0,"legacy":4,"orderTable":350,"orderDeck":250},</text:p>
          </table:table-cell>
          <table:table-cell table:number-columns-repeated="16347"/>
        </table:table-row>
        <table:table-row table:style-name="ro2">
          <table:table-cell office:value-type="float" office:value="351" calcext:value-type="float">
            <text:p>351</text:p>
          </table:table-cell>
          <table:table-cell office:value-type="float" office:value="241" calcext:value-type="float">
            <text:p>241</text:p>
          </table:table-cell>
          <table:table-cell office:value-type="string" calcext:value-type="string">
            <text:p>4-42</text:p>
          </table:table-cell>
          <table:table-cell office:value-type="float" office:value="42" calcext:value-type="float">
            <text:p>42</text:p>
          </table:table-cell>
          <table:table-cell office:value-type="string" calcext:value-type="string">
            <text:p>紡績工場</text:p>
          </table:table-cell>
          <table:table-cell office:value-type="string" calcext:value-type="string">
            <text:p>ぼうせきこうじょう</text:p>
          </table:table-cell>
          <table:table-cell office:value-type="string" calcext:value-type="string">
            <text:p>第４弾ブースターパック</text:p>
          </table:table-cell>
          <table:table-cell table:formula="of:=VLOOKUP([.G351];[$収録番号.$A$1:$収録番号.$B$9];2;0)" office:value-type="float" office:value="45" calcext:value-type="float">
            <text:p>45</text:p>
          </table:table-cell>
          <table:table-cell office:value-type="string" calcext:value-type="string">
            <text:p>N</text:p>
          </table:table-cell>
          <table:table-cell table:formula="of:=VLOOKUP([.I351];[$レアリティ番号.$A$1:$レアリティ番号.$B$4];2;0)" office:value-type="float" office:value="1" calcext:value-type="float">
            <text:p>1</text:p>
          </table:table-cell>
          <table:table-cell office:value-type="string" calcext:value-type="string">
            <text:p>ハイケイ</text:p>
          </table:table-cell>
          <table:table-cell table:formula="of:=VLOOKUP([.K351];[$種類番号.$A$1:$種類番号.$B$4];2;0)" office:value-type="float" office:value="2" calcext:value-type="float">
            <text:p>2</text:p>
          </table:table-cell>
          <table:table-cell office:value-type="string" calcext:value-type="string">
            <text:p>赤</text:p>
          </table:table-cell>
          <table:table-cell table:formula="of:=VLOOKUP([.M351];[$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5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51];[$特性番号.$A$1:$特性番号.$B$8];2;0);0)" office:value-type="float" office:value="0" calcext:value-type="float">
            <text:p>0</text:p>
          </table:table-cell>
          <table:table-cell office:value-type="string" calcext:value-type="string">
            <text:p>戦場に置かれたとき、魔力ゾーンに裏のカードが2つ以上あるなら、1ドローする。¶エンドフェイズが開始したとき、裏のカードが魔力ゾーンにないなら、これを破壊する。そうでなければ、魔力ゾーンの裏のカード1つを手札に戻す。</text:p>
          </table:table-cell>
          <table:table-cell table:style-name="ce8" table:formula="of:=NA()" office:value-type="string" office:string-value="" calcext:value-type="error">
            <text:p>#N/A</text:p>
          </table:table-cell>
          <table:table-cell table:formula="of:=IFERROR(VLOOKUP([.$V351];[$遺業能力番号.$A$1:$遺業能力番号.$B$9];2;0);0)" office:value-type="float" office:value="0" calcext:value-type="float">
            <text:p>0</text:p>
          </table:table-cell>
          <table:table-cell office:value-type="string" calcext:value-type="string">
            <text:p>https://one-draw.jp/ijinden/cardlist/004/card/04_042.png</text:p>
          </table:table-cell>
          <table:table-cell table:formula="of:=CONCATENATE([$JSON.$A$1];[.$C351];[$JSON.$B$1];[.$E351];[$JSON.$C$1];[.$F351];[$JSON.$D$1];IF(ISNA([.$S351]);&quot;null&quot;;&quot;&quot;&quot;&quot;&amp;[.$S351]&amp;&quot;&quot;&quot;&quot;);[$JSON.$E$1];[.$U351];[$JSON.$F$1];IF(ISNA([.$V351]);&quot;null&quot;;&quot;&quot;&quot;&quot;&amp;[.$V351]&amp;&quot;&quot;&quot;&quot;);[$JSON.$G$1];[.$X351];[$JSON.$H$1];[.$H351];[$JSON.$I$1];[.J351];[$JSON.$J$1];[.$L351];[$JSON.$K$1];[.$O351];[$JSON.$L$1];[.$N351];[$JSON.$M$1];[.$R351];[$JSON.$N$1];[.$T351];[$JSON.$O$1];[.$W351];[$JSON.$P$1];[.$A351];[$JSON.$Q$1];[.$B351];[$JSON.$R$1])" office:value-type="string" office:string-value="{&quot;id&quot;:&quot;4-42&quot;,&quot;name&quot;:&quot;紡績工場&quot;,&quot;kana&quot;:&quot;ぼうせきこうじょう&quot;,&quot;traitText&quot;:null,&quot;ruleText&quot;:&quot;戦場に置かれたとき、魔力ゾーンに裏のカードが2つ以上あるなら、1ドローする。¶エンドフェイズが開始したとき、裏のカードが魔力ゾーンにないなら、これを破壊する。そうでなければ、魔力ゾーンの裏のカード1つを手札に戻す。&quot;,&quot;legacyText&quot;:null,&quot;imageUrl&quot;:&quot;https://one-draw.jp/ijinden/cardlist/004/card/04_042.png&quot;,&quot;expansion&quot;:45,&quot;rarity&quot;:1,&quot;type&quot;:2,&quot;level&quot;:2,&quot;color&quot;:1,&quot;term&quot;:0,&quot;trait&quot;:0,&quot;legacy&quot;:0,&quot;orderTable&quot;:351,&quot;orderDeck&quot;:241}," calcext:value-type="string">
            <text:p>{"id":"4-42","name":"紡績工場","kana":"ぼうせきこうじょう","traitText":null,"ruleText":"戦場に置かれたとき、魔力ゾーンに裏のカードが2つ以上あるなら、1ドローする。¶エンドフェイズが開始したとき、裏のカードが魔力ゾーンにないなら、これを破壊する。そうでなければ、魔力ゾーンの裏のカード1つを手札に戻す。","legacyText":null,"imageUrl":"https://one-draw.jp/ijinden/cardlist/004/card/04_042.png","expansion":45,"rarity":1,"type":2,"level":2,"color":1,"term":0,"trait":0,"legacy":0,"orderTable":351,"orderDeck":241},</text:p>
          </table:table-cell>
          <table:table-cell table:number-columns-repeated="16347"/>
        </table:table-row>
        <table:table-row table:style-name="ro2">
          <table:table-cell office:value-type="float" office:value="352" calcext:value-type="float">
            <text:p>352</text:p>
          </table:table-cell>
          <table:table-cell office:value-type="float" office:value="238" calcext:value-type="float">
            <text:p>238</text:p>
          </table:table-cell>
          <table:table-cell office:value-type="string" calcext:value-type="string">
            <text:p>4-43</text:p>
          </table:table-cell>
          <table:table-cell office:value-type="float" office:value="43" calcext:value-type="float">
            <text:p>43</text:p>
          </table:table-cell>
          <table:table-cell office:value-type="string" calcext:value-type="string">
            <text:p>火と氷の大地</text:p>
          </table:table-cell>
          <table:table-cell office:value-type="string" calcext:value-type="string">
            <text:p>ひとこおりのだいち</text:p>
          </table:table-cell>
          <table:table-cell office:value-type="string" calcext:value-type="string">
            <text:p>第４弾ブースターパック</text:p>
          </table:table-cell>
          <table:table-cell table:formula="of:=VLOOKUP([.G352];[$収録番号.$A$1:$収録番号.$B$9];2;0)" office:value-type="float" office:value="45" calcext:value-type="float">
            <text:p>45</text:p>
          </table:table-cell>
          <table:table-cell office:value-type="string" calcext:value-type="string">
            <text:p>N</text:p>
          </table:table-cell>
          <table:table-cell table:formula="of:=VLOOKUP([.I352];[$レアリティ番号.$A$1:$レアリティ番号.$B$4];2;0)" office:value-type="float" office:value="1" calcext:value-type="float">
            <text:p>1</text:p>
          </table:table-cell>
          <table:table-cell office:value-type="string" calcext:value-type="string">
            <text:p>ハイケイ</text:p>
          </table:table-cell>
          <table:table-cell table:formula="of:=VLOOKUP([.K352];[$種類番号.$A$1:$種類番号.$B$4];2;0)" office:value-type="float" office:value="2" calcext:value-type="float">
            <text:p>2</text:p>
          </table:table-cell>
          <table:table-cell office:value-type="string" calcext:value-type="string">
            <text:p>青</text:p>
          </table:table-cell>
          <table:table-cell table:formula="of:=VLOOKUP([.M352];[$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5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52];[$特性番号.$A$1:$特性番号.$B$8];2;0);0)" office:value-type="float" office:value="0" calcext:value-type="float">
            <text:p>0</text:p>
          </table:table-cell>
          <table:table-cell office:value-type="string" calcext:value-type="string">
            <text:p>これが戦場にある間、自分の戦場の青のイジンは「赤のイジンにブロックされない」を得る。¶これが戦場にある間、相手の戦場のレベル2以下のイジンは「色：赤」を得る。</text:p>
          </table:table-cell>
          <table:table-cell table:style-name="ce8" office:value-type="string" calcext:value-type="string">
            <text:p>手札に戻す</text:p>
          </table:table-cell>
          <table:table-cell table:formula="of:=IFERROR(VLOOKUP([.$V352];[$遺業能力番号.$A$1:$遺業能力番号.$B$9];2;0);0)" office:value-type="float" office:value="5" calcext:value-type="float">
            <text:p>5</text:p>
          </table:table-cell>
          <table:table-cell office:value-type="string" calcext:value-type="string">
            <text:p>https://one-draw.jp/ijinden/cardlist/004/card/04_043.png</text:p>
          </table:table-cell>
          <table:table-cell table:formula="of:=CONCATENATE([$JSON.$A$1];[.$C352];[$JSON.$B$1];[.$E352];[$JSON.$C$1];[.$F352];[$JSON.$D$1];IF(ISNA([.$S352]);&quot;null&quot;;&quot;&quot;&quot;&quot;&amp;[.$S352]&amp;&quot;&quot;&quot;&quot;);[$JSON.$E$1];[.$U352];[$JSON.$F$1];IF(ISNA([.$V352]);&quot;null&quot;;&quot;&quot;&quot;&quot;&amp;[.$V352]&amp;&quot;&quot;&quot;&quot;);[$JSON.$G$1];[.$X352];[$JSON.$H$1];[.$H352];[$JSON.$I$1];[.J352];[$JSON.$J$1];[.$L352];[$JSON.$K$1];[.$O352];[$JSON.$L$1];[.$N352];[$JSON.$M$1];[.$R352];[$JSON.$N$1];[.$T352];[$JSON.$O$1];[.$W352];[$JSON.$P$1];[.$A352];[$JSON.$Q$1];[.$B352];[$JSON.$R$1])" office:value-type="string" office:string-value="{&quot;id&quot;:&quot;4-43&quot;,&quot;name&quot;:&quot;火と氷の大地&quot;,&quot;kana&quot;:&quot;ひとこおりのだいち&quot;,&quot;traitText&quot;:null,&quot;ruleText&quot;:&quot;これが戦場にある間、自分の戦場の青のイジンは「赤のイジンにブロックされない」を得る。¶これが戦場にある間、相手の戦場のレベル2以下のイジンは「色：赤」を得る。&quot;,&quot;legacyText&quot;:&quot;手札に戻す&quot;,&quot;imageUrl&quot;:&quot;https://one-draw.jp/ijinden/cardlist/004/card/04_043.png&quot;,&quot;expansion&quot;:45,&quot;rarity&quot;:1,&quot;type&quot;:2,&quot;level&quot;:1,&quot;color&quot;:2,&quot;term&quot;:0,&quot;trait&quot;:0,&quot;legacy&quot;:5,&quot;orderTable&quot;:352,&quot;orderDeck&quot;:238}," calcext:value-type="string">
            <text:p>{"id":"4-43","name":"火と氷の大地","kana":"ひとこおりのだいち","traitText":null,"ruleText":"これが戦場にある間、自分の戦場の青のイジンは「赤のイジンにブロックされない」を得る。¶これが戦場にある間、相手の戦場のレベル2以下のイジンは「色：赤」を得る。","legacyText":"手札に戻す","imageUrl":"https://one-draw.jp/ijinden/cardlist/004/card/04_043.png","expansion":45,"rarity":1,"type":2,"level":1,"color":2,"term":0,"trait":0,"legacy":5,"orderTable":352,"orderDeck":238},</text:p>
          </table:table-cell>
          <table:table-cell table:number-columns-repeated="16347"/>
        </table:table-row>
        <table:table-row table:style-name="ro2">
          <table:table-cell office:value-type="float" office:value="353" calcext:value-type="float">
            <text:p>353</text:p>
          </table:table-cell>
          <table:table-cell office:value-type="float" office:value="275" calcext:value-type="float">
            <text:p>275</text:p>
          </table:table-cell>
          <table:table-cell office:value-type="string" calcext:value-type="string">
            <text:p>4-44</text:p>
          </table:table-cell>
          <table:table-cell office:value-type="float" office:value="44" calcext:value-type="float">
            <text:p>44</text:p>
          </table:table-cell>
          <table:table-cell office:value-type="string" calcext:value-type="string">
            <text:p>落日の王宮</text:p>
          </table:table-cell>
          <table:table-cell office:value-type="string" calcext:value-type="string">
            <text:p>らくじつのおうきゅう</text:p>
          </table:table-cell>
          <table:table-cell office:value-type="string" calcext:value-type="string">
            <text:p>第４弾ブースターパック</text:p>
          </table:table-cell>
          <table:table-cell table:formula="of:=VLOOKUP([.G353];[$収録番号.$A$1:$収録番号.$B$9];2;0)" office:value-type="float" office:value="45" calcext:value-type="float">
            <text:p>45</text:p>
          </table:table-cell>
          <table:table-cell office:value-type="string" calcext:value-type="string">
            <text:p>N</text:p>
          </table:table-cell>
          <table:table-cell table:formula="of:=VLOOKUP([.I353];[$レアリティ番号.$A$1:$レアリティ番号.$B$4];2;0)" office:value-type="float" office:value="1" calcext:value-type="float">
            <text:p>1</text:p>
          </table:table-cell>
          <table:table-cell office:value-type="string" calcext:value-type="string">
            <text:p>ハイケイ</text:p>
          </table:table-cell>
          <table:table-cell table:formula="of:=VLOOKUP([.K353];[$種類番号.$A$1:$種類番号.$B$4];2;0)" office:value-type="float" office:value="2" calcext:value-type="float">
            <text:p>2</text:p>
          </table:table-cell>
          <table:table-cell office:value-type="string" calcext:value-type="string">
            <text:p>青</text:p>
          </table:table-cell>
          <table:table-cell table:formula="of:=VLOOKUP([.M353];[$色番号.$A$1:$色番号.$B$10];2;0)" office:value-type="float" office:value="2" calcext:value-type="float">
            <text:p>2</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53];[$能力語番号.$A$1:$能力語番号.$B$10];2;0);0)" office:value-type="float" office:value="0" calcext:value-type="float">
            <text:p>0</text:p>
          </table:table-cell>
          <table:table-cell office:value-type="string" calcext:value-type="string">
            <text:p>美術 思想</text:p>
          </table:table-cell>
          <table:table-cell table:formula="of:=IFERROR(VLOOKUP([.$S353];[$特性番号.$A$1:$特性番号.$B$8];2;0);0)" office:value-type="float" office:value="10" calcext:value-type="float">
            <text:p>10</text:p>
          </table:table-cell>
          <table:table-cell office:value-type="string" calcext:value-type="string">
            <text:p>戦場に置かれたときに発動できる。自分の山札の上から3枚を墓地に置いて、自分の墓地のカード1つを山札の上に戻す。¶自分のメインフェイズが開始したときに発動できる。自分の山札の上から1枚を墓地に置いて、自分の墓地のカード1つを手札に戻す。</text:p>
          </table:table-cell>
          <table:table-cell table:style-name="ce8" table:formula="of:=NA()" office:value-type="string" office:string-value="" calcext:value-type="error">
            <text:p>#N/A</text:p>
          </table:table-cell>
          <table:table-cell table:formula="of:=IFERROR(VLOOKUP([.$V353];[$遺業能力番号.$A$1:$遺業能力番号.$B$9];2;0);0)" office:value-type="float" office:value="0" calcext:value-type="float">
            <text:p>0</text:p>
          </table:table-cell>
          <table:table-cell office:value-type="string" calcext:value-type="string">
            <text:p>https://one-draw.jp/ijinden/cardlist/004/card/04_044.png</text:p>
          </table:table-cell>
          <table:table-cell table:formula="of:=CONCATENATE([$JSON.$A$1];[.$C353];[$JSON.$B$1];[.$E353];[$JSON.$C$1];[.$F353];[$JSON.$D$1];IF(ISNA([.$S353]);&quot;null&quot;;&quot;&quot;&quot;&quot;&amp;[.$S353]&amp;&quot;&quot;&quot;&quot;);[$JSON.$E$1];[.$U353];[$JSON.$F$1];IF(ISNA([.$V353]);&quot;null&quot;;&quot;&quot;&quot;&quot;&amp;[.$V353]&amp;&quot;&quot;&quot;&quot;);[$JSON.$G$1];[.$X353];[$JSON.$H$1];[.$H353];[$JSON.$I$1];[.J353];[$JSON.$J$1];[.$L353];[$JSON.$K$1];[.$O353];[$JSON.$L$1];[.$N353];[$JSON.$M$1];[.$R353];[$JSON.$N$1];[.$T353];[$JSON.$O$1];[.$W353];[$JSON.$P$1];[.$A353];[$JSON.$Q$1];[.$B353];[$JSON.$R$1])" office:value-type="string" office:string-value="{&quot;id&quot;:&quot;4-44&quot;,&quot;name&quot;:&quot;落日の王宮&quot;,&quot;kana&quot;:&quot;らくじつのおうきゅう&quot;,&quot;traitText&quot;:&quot;美術 思想&quot;,&quot;ruleText&quot;:&quot;戦場に置かれたときに発動できる。自分の山札の上から3枚を墓地に置いて、自分の墓地のカード1つを山札の上に戻す。¶自分のメインフェイズが開始したときに発動できる。自分の山札の上から1枚を墓地に置いて、自分の墓地のカード1つを手札に戻す。&quot;,&quot;legacyText&quot;:null,&quot;imageUrl&quot;:&quot;https://one-draw.jp/ijinden/cardlist/004/card/04_044.png&quot;,&quot;expansion&quot;:45,&quot;rarity&quot;:1,&quot;type&quot;:2,&quot;level&quot;:6,&quot;color&quot;:2,&quot;term&quot;:0,&quot;trait&quot;:10,&quot;legacy&quot;:0,&quot;orderTable&quot;:353,&quot;orderDeck&quot;:275}," calcext:value-type="string">
            <text:p>{"id":"4-44","name":"落日の王宮","kana":"らくじつのおうきゅう","traitText":"美術 思想","ruleText":"戦場に置かれたときに発動できる。自分の山札の上から3枚を墓地に置いて、自分の墓地のカード1つを山札の上に戻す。¶自分のメインフェイズが開始したときに発動できる。自分の山札の上から1枚を墓地に置いて、自分の墓地のカード1つを手札に戻す。","legacyText":null,"imageUrl":"https://one-draw.jp/ijinden/cardlist/004/card/04_044.png","expansion":45,"rarity":1,"type":2,"level":6,"color":2,"term":0,"trait":10,"legacy":0,"orderTable":353,"orderDeck":275},</text:p>
          </table:table-cell>
          <table:table-cell table:number-columns-repeated="16347"/>
        </table:table-row>
        <table:table-row table:style-name="ro2">
          <table:table-cell office:value-type="float" office:value="354" calcext:value-type="float">
            <text:p>354</text:p>
          </table:table-cell>
          <table:table-cell office:value-type="float" office:value="254" calcext:value-type="float">
            <text:p>254</text:p>
          </table:table-cell>
          <table:table-cell office:value-type="string" calcext:value-type="string">
            <text:p>4-45</text:p>
          </table:table-cell>
          <table:table-cell office:value-type="float" office:value="45" calcext:value-type="float">
            <text:p>45</text:p>
          </table:table-cell>
          <table:table-cell office:value-type="string" calcext:value-type="string">
            <text:p>遣外使節団</text:p>
          </table:table-cell>
          <table:table-cell office:value-type="string" calcext:value-type="string">
            <text:p>けんがいしせつだん</text:p>
          </table:table-cell>
          <table:table-cell office:value-type="string" calcext:value-type="string">
            <text:p>第４弾ブースターパック</text:p>
          </table:table-cell>
          <table:table-cell table:formula="of:=VLOOKUP([.G354];[$収録番号.$A$1:$収録番号.$B$9];2;0)" office:value-type="float" office:value="45" calcext:value-type="float">
            <text:p>45</text:p>
          </table:table-cell>
          <table:table-cell office:value-type="string" calcext:value-type="string">
            <text:p>N</text:p>
          </table:table-cell>
          <table:table-cell table:formula="of:=VLOOKUP([.I354];[$レアリティ番号.$A$1:$レアリティ番号.$B$4];2;0)" office:value-type="float" office:value="1" calcext:value-type="float">
            <text:p>1</text:p>
          </table:table-cell>
          <table:table-cell office:value-type="string" calcext:value-type="string">
            <text:p>ハイケイ</text:p>
          </table:table-cell>
          <table:table-cell table:formula="of:=VLOOKUP([.K354];[$種類番号.$A$1:$種類番号.$B$4];2;0)" office:value-type="float" office:value="2" calcext:value-type="float">
            <text:p>2</text:p>
          </table:table-cell>
          <table:table-cell office:value-type="string" calcext:value-type="string">
            <text:p>緑</text:p>
          </table:table-cell>
          <table:table-cell table:formula="of:=VLOOKUP([.M354];[$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5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54];[$特性番号.$A$1:$特性番号.$B$8];2;0);0)" office:value-type="float" office:value="0" calcext:value-type="float">
            <text:p>0</text:p>
          </table:table-cell>
          <table:table-cell office:value-type="string" calcext:value-type="string">
            <text:p>自分がイジン召喚する際、そのイジンのレベルは、相手の戦場の色1つにつき1だけ下がる。</text:p>
          </table:table-cell>
          <table:table-cell table:style-name="ce8" table:formula="of:=NA()" office:value-type="string" office:string-value="" calcext:value-type="error">
            <text:p>#N/A</text:p>
          </table:table-cell>
          <table:table-cell table:formula="of:=IFERROR(VLOOKUP([.$V354];[$遺業能力番号.$A$1:$遺業能力番号.$B$9];2;0);0)" office:value-type="float" office:value="0" calcext:value-type="float">
            <text:p>0</text:p>
          </table:table-cell>
          <table:table-cell office:value-type="string" calcext:value-type="string">
            <text:p>https://one-draw.jp/ijinden/cardlist/004/card/04_045.png</text:p>
          </table:table-cell>
          <table:table-cell table:formula="of:=CONCATENATE([$JSON.$A$1];[.$C354];[$JSON.$B$1];[.$E354];[$JSON.$C$1];[.$F354];[$JSON.$D$1];IF(ISNA([.$S354]);&quot;null&quot;;&quot;&quot;&quot;&quot;&amp;[.$S354]&amp;&quot;&quot;&quot;&quot;);[$JSON.$E$1];[.$U354];[$JSON.$F$1];IF(ISNA([.$V354]);&quot;null&quot;;&quot;&quot;&quot;&quot;&amp;[.$V354]&amp;&quot;&quot;&quot;&quot;);[$JSON.$G$1];[.$X354];[$JSON.$H$1];[.$H354];[$JSON.$I$1];[.J354];[$JSON.$J$1];[.$L354];[$JSON.$K$1];[.$O354];[$JSON.$L$1];[.$N354];[$JSON.$M$1];[.$R354];[$JSON.$N$1];[.$T354];[$JSON.$O$1];[.$W354];[$JSON.$P$1];[.$A354];[$JSON.$Q$1];[.$B354];[$JSON.$R$1])" office:value-type="string" office:string-value="{&quot;id&quot;:&quot;4-45&quot;,&quot;name&quot;:&quot;遣外使節団&quot;,&quot;kana&quot;:&quot;けんがいしせつだん&quot;,&quot;traitText&quot;:null,&quot;ruleText&quot;:&quot;自分がイジン召喚する際、そのイジンのレベルは、相手の戦場の色1つにつき1だけ下がる。&quot;,&quot;legacyText&quot;:null,&quot;imageUrl&quot;:&quot;https://one-draw.jp/ijinden/cardlist/004/card/04_045.png&quot;,&quot;expansion&quot;:45,&quot;rarity&quot;:1,&quot;type&quot;:2,&quot;level&quot;:3,&quot;color&quot;:4,&quot;term&quot;:0,&quot;trait&quot;:0,&quot;legacy&quot;:0,&quot;orderTable&quot;:354,&quot;orderDeck&quot;:254}," calcext:value-type="string">
            <text:p>{"id":"4-45","name":"遣外使節団","kana":"けんがいしせつだん","traitText":null,"ruleText":"自分がイジン召喚する際、そのイジンのレベルは、相手の戦場の色1つにつき1だけ下がる。","legacyText":null,"imageUrl":"https://one-draw.jp/ijinden/cardlist/004/card/04_045.png","expansion":45,"rarity":1,"type":2,"level":3,"color":4,"term":0,"trait":0,"legacy":0,"orderTable":354,"orderDeck":254},</text:p>
          </table:table-cell>
          <table:table-cell table:number-columns-repeated="16347"/>
        </table:table-row>
        <table:table-row table:style-name="ro2">
          <table:table-cell office:value-type="float" office:value="355" calcext:value-type="float">
            <text:p>355</text:p>
          </table:table-cell>
          <table:table-cell office:value-type="float" office:value="280" calcext:value-type="float">
            <text:p>280</text:p>
          </table:table-cell>
          <table:table-cell office:value-type="string" calcext:value-type="string">
            <text:p>4-46</text:p>
          </table:table-cell>
          <table:table-cell office:value-type="float" office:value="46" calcext:value-type="float">
            <text:p>46</text:p>
          </table:table-cell>
          <table:table-cell office:value-type="string" calcext:value-type="string">
            <text:p>大日本沿海輿地全図</text:p>
          </table:table-cell>
          <table:table-cell office:value-type="string" calcext:value-type="string">
            <text:p>だいにほんえんかいよちぜんず</text:p>
          </table:table-cell>
          <table:table-cell office:value-type="string" calcext:value-type="string">
            <text:p>第４弾ブースターパック</text:p>
          </table:table-cell>
          <table:table-cell table:formula="of:=VLOOKUP([.G355];[$収録番号.$A$1:$収録番号.$B$9];2;0)" office:value-type="float" office:value="45" calcext:value-type="float">
            <text:p>45</text:p>
          </table:table-cell>
          <table:table-cell office:value-type="string" calcext:value-type="string">
            <text:p>N</text:p>
          </table:table-cell>
          <table:table-cell table:formula="of:=VLOOKUP([.I355];[$レアリティ番号.$A$1:$レアリティ番号.$B$4];2;0)" office:value-type="float" office:value="1" calcext:value-type="float">
            <text:p>1</text:p>
          </table:table-cell>
          <table:table-cell office:value-type="string" calcext:value-type="string">
            <text:p>ハイケイ</text:p>
          </table:table-cell>
          <table:table-cell table:formula="of:=VLOOKUP([.K355];[$種類番号.$A$1:$種類番号.$B$4];2;0)" office:value-type="float" office:value="2" calcext:value-type="float">
            <text:p>2</text:p>
          </table:table-cell>
          <table:table-cell office:value-type="string" calcext:value-type="string">
            <text:p>緑</text:p>
          </table:table-cell>
          <table:table-cell table:formula="of:=VLOOKUP([.M355];[$色番号.$A$1:$色番号.$B$10];2;0)" office:value-type="float" office:value="4" calcext:value-type="float">
            <text:p>4</text:p>
          </table:table-cell>
          <table:table-cell office:value-type="float" office:value="17" calcext:value-type="float">
            <text:p>1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5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55];[$特性番号.$A$1:$特性番号.$B$8];2;0);0)" office:value-type="float" office:value="0" calcext:value-type="float">
            <text:p>0</text:p>
          </table:table-cell>
          <table:table-cell office:value-type="string" calcext:value-type="string">
            <text:p>これのハイケイ使用に際し、これのレベルは、戦場のハイケイのレベルの合計と同じだけ下がる。¶自分のメインフェイズが開始したとき、ハイケイの名前が戦場に6つ以上あるなら発動する。ゲームに勝利する。</text:p>
          </table:table-cell>
          <table:table-cell table:style-name="ce8" office:value-type="string" calcext:value-type="string">
            <text:p>魔力化</text:p>
          </table:table-cell>
          <table:table-cell table:formula="of:=IFERROR(VLOOKUP([.$V355];[$遺業能力番号.$A$1:$遺業能力番号.$B$9];2;0);0)" office:value-type="float" office:value="1" calcext:value-type="float">
            <text:p>1</text:p>
          </table:table-cell>
          <table:table-cell office:value-type="string" calcext:value-type="string">
            <text:p>https://one-draw.jp/ijinden/cardlist/004/card/04_046.png</text:p>
          </table:table-cell>
          <table:table-cell table:formula="of:=CONCATENATE([$JSON.$A$1];[.$C355];[$JSON.$B$1];[.$E355];[$JSON.$C$1];[.$F355];[$JSON.$D$1];IF(ISNA([.$S355]);&quot;null&quot;;&quot;&quot;&quot;&quot;&amp;[.$S355]&amp;&quot;&quot;&quot;&quot;);[$JSON.$E$1];[.$U355];[$JSON.$F$1];IF(ISNA([.$V355]);&quot;null&quot;;&quot;&quot;&quot;&quot;&amp;[.$V355]&amp;&quot;&quot;&quot;&quot;);[$JSON.$G$1];[.$X355];[$JSON.$H$1];[.$H355];[$JSON.$I$1];[.J355];[$JSON.$J$1];[.$L355];[$JSON.$K$1];[.$O355];[$JSON.$L$1];[.$N355];[$JSON.$M$1];[.$R355];[$JSON.$N$1];[.$T355];[$JSON.$O$1];[.$W355];[$JSON.$P$1];[.$A355];[$JSON.$Q$1];[.$B355];[$JSON.$R$1])" office:value-type="string" office:string-value="{&quot;id&quot;:&quot;4-46&quot;,&quot;name&quot;:&quot;大日本沿海輿地全図&quot;,&quot;kana&quot;:&quot;だいにほんえんかいよちぜんず&quot;,&quot;traitText&quot;:null,&quot;ruleText&quot;:&quot;これのハイケイ使用に際し、これのレベルは、戦場のハイケイのレベルの合計と同じだけ下がる。¶自分のメインフェイズが開始したとき、ハイケイの名前が戦場に6つ以上あるなら発動する。ゲームに勝利する。&quot;,&quot;legacyText&quot;:&quot;魔力化&quot;,&quot;imageUrl&quot;:&quot;https://one-draw.jp/ijinden/cardlist/004/card/04_046.png&quot;,&quot;expansion&quot;:45,&quot;rarity&quot;:1,&quot;type&quot;:2,&quot;level&quot;:17,&quot;color&quot;:4,&quot;term&quot;:0,&quot;trait&quot;:0,&quot;legacy&quot;:1,&quot;orderTable&quot;:355,&quot;orderDeck&quot;:280}," calcext:value-type="string">
            <text:p>{"id":"4-46","name":"大日本沿海輿地全図","kana":"だいにほんえんかいよちぜんず","traitText":null,"ruleText":"これのハイケイ使用に際し、これのレベルは、戦場のハイケイのレベルの合計と同じだけ下がる。¶自分のメインフェイズが開始したとき、ハイケイの名前が戦場に6つ以上あるなら発動する。ゲームに勝利する。","legacyText":"魔力化","imageUrl":"https://one-draw.jp/ijinden/cardlist/004/card/04_046.png","expansion":45,"rarity":1,"type":2,"level":17,"color":4,"term":0,"trait":0,"legacy":1,"orderTable":355,"orderDeck":280},</text:p>
          </table:table-cell>
          <table:table-cell table:number-columns-repeated="16347"/>
        </table:table-row>
        <table:table-row table:style-name="ro2">
          <table:table-cell office:value-type="float" office:value="356" calcext:value-type="float">
            <text:p>356</text:p>
          </table:table-cell>
          <table:table-cell office:value-type="float" office:value="258" calcext:value-type="float">
            <text:p>258</text:p>
          </table:table-cell>
          <table:table-cell office:value-type="string" calcext:value-type="string">
            <text:p>4-47</text:p>
          </table:table-cell>
          <table:table-cell office:value-type="float" office:value="47" calcext:value-type="float">
            <text:p>47</text:p>
          </table:table-cell>
          <table:table-cell office:value-type="string" calcext:value-type="string">
            <text:p>マザーグース</text:p>
          </table:table-cell>
          <table:table-cell office:value-type="string" calcext:value-type="string">
            <text:p>まざーぐーす</text:p>
          </table:table-cell>
          <table:table-cell office:value-type="string" calcext:value-type="string">
            <text:p>第４弾ブースターパック</text:p>
          </table:table-cell>
          <table:table-cell table:formula="of:=VLOOKUP([.G356];[$収録番号.$A$1:$収録番号.$B$9];2;0)" office:value-type="float" office:value="45" calcext:value-type="float">
            <text:p>45</text:p>
          </table:table-cell>
          <table:table-cell office:value-type="string" calcext:value-type="string">
            <text:p>N</text:p>
          </table:table-cell>
          <table:table-cell table:formula="of:=VLOOKUP([.I356];[$レアリティ番号.$A$1:$レアリティ番号.$B$4];2;0)" office:value-type="float" office:value="1" calcext:value-type="float">
            <text:p>1</text:p>
          </table:table-cell>
          <table:table-cell office:value-type="string" calcext:value-type="string">
            <text:p>ハイケイ</text:p>
          </table:table-cell>
          <table:table-cell table:formula="of:=VLOOKUP([.K356];[$種類番号.$A$1:$種類番号.$B$4];2;0)" office:value-type="float" office:value="2" calcext:value-type="float">
            <text:p>2</text:p>
          </table:table-cell>
          <table:table-cell office:value-type="string" calcext:value-type="string">
            <text:p>黄</text:p>
          </table:table-cell>
          <table:table-cell table:formula="of:=VLOOKUP([.M356];[$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執筆</text:p>
          </table:table-cell>
          <table:table-cell table:formula="of:=IFERROR(VLOOKUP([.$Q356];[$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356];[$特性番号.$A$1:$特性番号.$B$8];2;0);0)" office:value-type="float" office:value="0" calcext:value-type="float">
            <text:p>0</text:p>
          </table:table-cell>
          <table:table-cell office:value-type="string" calcext:value-type="string">
            <text:p>執筆 - ハイケイが戦場に置かれたときに発動できる。自分の戦場の黄のカード3つにつき1ドローして、これを破壊する。¶冥装¶装備 : 「特性：音楽」</text:p>
          </table:table-cell>
          <table:table-cell table:style-name="ce8" office:value-type="string" calcext:value-type="string">
            <text:p>喪神</text:p>
          </table:table-cell>
          <table:table-cell table:formula="of:=IFERROR(VLOOKUP([.$V356];[$遺業能力番号.$A$1:$遺業能力番号.$B$9];2;0);0)" office:value-type="float" office:value="9" calcext:value-type="float">
            <text:p>9</text:p>
          </table:table-cell>
          <table:table-cell office:value-type="string" calcext:value-type="string">
            <text:p>https://one-draw.jp/ijinden/cardlist/004/card/04_047.png</text:p>
          </table:table-cell>
          <table:table-cell table:formula="of:=CONCATENATE([$JSON.$A$1];[.$C356];[$JSON.$B$1];[.$E356];[$JSON.$C$1];[.$F356];[$JSON.$D$1];IF(ISNA([.$S356]);&quot;null&quot;;&quot;&quot;&quot;&quot;&amp;[.$S356]&amp;&quot;&quot;&quot;&quot;);[$JSON.$E$1];[.$U356];[$JSON.$F$1];IF(ISNA([.$V356]);&quot;null&quot;;&quot;&quot;&quot;&quot;&amp;[.$V356]&amp;&quot;&quot;&quot;&quot;);[$JSON.$G$1];[.$X356];[$JSON.$H$1];[.$H356];[$JSON.$I$1];[.J356];[$JSON.$J$1];[.$L356];[$JSON.$K$1];[.$O356];[$JSON.$L$1];[.$N356];[$JSON.$M$1];[.$R356];[$JSON.$N$1];[.$T356];[$JSON.$O$1];[.$W356];[$JSON.$P$1];[.$A356];[$JSON.$Q$1];[.$B356];[$JSON.$R$1])" office:value-type="string" office:string-value="{&quot;id&quot;:&quot;4-47&quot;,&quot;name&quot;:&quot;マザーグース&quot;,&quot;kana&quot;:&quot;まざーぐーす&quot;,&quot;traitText&quot;:null,&quot;ruleText&quot;:&quot;執筆 - ハイケイが戦場に置かれたときに発動できる。自分の戦場の黄のカード3つにつき1ドローして、これを破壊する。¶冥装¶装備 : 「特性：音楽」&quot;,&quot;legacyText&quot;:&quot;喪神&quot;,&quot;imageUrl&quot;:&quot;https://one-draw.jp/ijinden/cardlist/004/card/04_047.png&quot;,&quot;expansion&quot;:45,&quot;rarity&quot;:1,&quot;type&quot;:2,&quot;level&quot;:3,&quot;color&quot;:8,&quot;term&quot;:2,&quot;trait&quot;:0,&quot;legacy&quot;:9,&quot;orderTable&quot;:356,&quot;orderDeck&quot;:258}," calcext:value-type="string">
            <text:p>{"id":"4-47","name":"マザーグース","kana":"まざーぐーす","traitText":null,"ruleText":"執筆 - ハイケイが戦場に置かれたときに発動できる。自分の戦場の黄のカード3つにつき1ドローして、これを破壊する。¶冥装¶装備 : 「特性：音楽」","legacyText":"喪神","imageUrl":"https://one-draw.jp/ijinden/cardlist/004/card/04_047.png","expansion":45,"rarity":1,"type":2,"level":3,"color":8,"term":2,"trait":0,"legacy":9,"orderTable":356,"orderDeck":258},</text:p>
          </table:table-cell>
          <table:table-cell table:number-columns-repeated="16347"/>
        </table:table-row>
        <table:table-row table:style-name="ro2">
          <table:table-cell office:value-type="float" office:value="357" calcext:value-type="float">
            <text:p>357</text:p>
          </table:table-cell>
          <table:table-cell office:value-type="float" office:value="265" calcext:value-type="float">
            <text:p>265</text:p>
          </table:table-cell>
          <table:table-cell office:value-type="string" calcext:value-type="string">
            <text:p>4-48</text:p>
          </table:table-cell>
          <table:table-cell office:value-type="float" office:value="48" calcext:value-type="float">
            <text:p>48</text:p>
          </table:table-cell>
          <table:table-cell office:value-type="string" calcext:value-type="string">
            <text:p>遠征軍</text:p>
          </table:table-cell>
          <table:table-cell office:value-type="string" calcext:value-type="string">
            <text:p>えんせいぐん</text:p>
          </table:table-cell>
          <table:table-cell office:value-type="string" calcext:value-type="string">
            <text:p>第４弾ブースターパック</text:p>
          </table:table-cell>
          <table:table-cell table:formula="of:=VLOOKUP([.G357];[$収録番号.$A$1:$収録番号.$B$9];2;0)" office:value-type="float" office:value="45" calcext:value-type="float">
            <text:p>45</text:p>
          </table:table-cell>
          <table:table-cell office:value-type="string" calcext:value-type="string">
            <text:p>N</text:p>
          </table:table-cell>
          <table:table-cell table:formula="of:=VLOOKUP([.I357];[$レアリティ番号.$A$1:$レアリティ番号.$B$4];2;0)" office:value-type="float" office:value="1" calcext:value-type="float">
            <text:p>1</text:p>
          </table:table-cell>
          <table:table-cell office:value-type="string" calcext:value-type="string">
            <text:p>ハイケイ</text:p>
          </table:table-cell>
          <table:table-cell table:formula="of:=VLOOKUP([.K357];[$種類番号.$A$1:$種類番号.$B$4];2;0)" office:value-type="float" office:value="2" calcext:value-type="float">
            <text:p>2</text:p>
          </table:table-cell>
          <table:table-cell office:value-type="string" calcext:value-type="string">
            <text:p>黄</text:p>
          </table:table-cell>
          <table:table-cell table:formula="of:=VLOOKUP([.M357];[$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5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57];[$特性番号.$A$1:$特性番号.$B$8];2;0);0)" office:value-type="float" office:value="0" calcext:value-type="float">
            <text:p>0</text:p>
          </table:table-cell>
          <table:table-cell office:value-type="string" calcext:value-type="string">
            <text:p>山札から墓地に置かれたときに発動できる。このターンに限り、自分は「自分の山札のカードは墓地に置かれない」を得る。その後バトルを中断する。ターンプレイヤーは残りのフェイズを行わずにターンを終了する。¶自分のエンドフェイズが開始したときに発動できる。これを山札の上に戻す。</text:p>
          </table:table-cell>
          <table:table-cell table:style-name="ce8" office:value-type="string" calcext:value-type="string">
            <text:p>山札の上か下に戻す</text:p>
          </table:table-cell>
          <table:table-cell table:formula="of:=IFERROR(VLOOKUP([.$V357];[$遺業能力番号.$A$1:$遺業能力番号.$B$9];2;0);0)" office:value-type="float" office:value="7" calcext:value-type="float">
            <text:p>7</text:p>
          </table:table-cell>
          <table:table-cell office:value-type="string" calcext:value-type="string">
            <text:p>https://one-draw.jp/ijinden/cardlist/004/card/04_048.png</text:p>
          </table:table-cell>
          <table:table-cell table:formula="of:=CONCATENATE([$JSON.$A$1];[.$C357];[$JSON.$B$1];[.$E357];[$JSON.$C$1];[.$F357];[$JSON.$D$1];IF(ISNA([.$S357]);&quot;null&quot;;&quot;&quot;&quot;&quot;&amp;[.$S357]&amp;&quot;&quot;&quot;&quot;);[$JSON.$E$1];[.$U357];[$JSON.$F$1];IF(ISNA([.$V357]);&quot;null&quot;;&quot;&quot;&quot;&quot;&amp;[.$V357]&amp;&quot;&quot;&quot;&quot;);[$JSON.$G$1];[.$X357];[$JSON.$H$1];[.$H357];[$JSON.$I$1];[.J357];[$JSON.$J$1];[.$L357];[$JSON.$K$1];[.$O357];[$JSON.$L$1];[.$N357];[$JSON.$M$1];[.$R357];[$JSON.$N$1];[.$T357];[$JSON.$O$1];[.$W357];[$JSON.$P$1];[.$A357];[$JSON.$Q$1];[.$B357];[$JSON.$R$1])" office:value-type="string" office:string-value="{&quot;id&quot;:&quot;4-48&quot;,&quot;name&quot;:&quot;遠征軍&quot;,&quot;kana&quot;:&quot;えんせいぐん&quot;,&quot;traitText&quot;:null,&quot;ruleText&quot;:&quot;山札から墓地に置かれたときに発動できる。このターンに限り、自分は「自分の山札のカードは墓地に置かれない」を得る。その後バトルを中断する。ターンプレイヤーは残りのフェイズを行わずにターンを終了する。¶自分のエンドフェイズが開始したときに発動できる。これを山札の上に戻す。&quot;,&quot;legacyText&quot;:&quot;山札の上か下に戻す&quot;,&quot;imageUrl&quot;:&quot;https://one-draw.jp/ijinden/cardlist/004/card/04_048.png&quot;,&quot;expansion&quot;:45,&quot;rarity&quot;:1,&quot;type&quot;:2,&quot;level&quot;:4,&quot;color&quot;:8,&quot;term&quot;:0,&quot;trait&quot;:0,&quot;legacy&quot;:7,&quot;orderTable&quot;:357,&quot;orderDeck&quot;:265}," calcext:value-type="string">
            <text:p>{"id":"4-48","name":"遠征軍","kana":"えんせいぐん","traitText":null,"ruleText":"山札から墓地に置かれたときに発動できる。このターンに限り、自分は「自分の山札のカードは墓地に置かれない」を得る。その後バトルを中断する。ターンプレイヤーは残りのフェイズを行わずにターンを終了する。¶自分のエンドフェイズが開始したときに発動できる。これを山札の上に戻す。","legacyText":"山札の上か下に戻す","imageUrl":"https://one-draw.jp/ijinden/cardlist/004/card/04_048.png","expansion":45,"rarity":1,"type":2,"level":4,"color":8,"term":0,"trait":0,"legacy":7,"orderTable":357,"orderDeck":265},</text:p>
          </table:table-cell>
          <table:table-cell table:number-columns-repeated="16347"/>
        </table:table-row>
        <table:table-row table:style-name="ro2">
          <table:table-cell office:value-type="float" office:value="358" calcext:value-type="float">
            <text:p>358</text:p>
          </table:table-cell>
          <table:table-cell office:value-type="float" office:value="272" calcext:value-type="float">
            <text:p>272</text:p>
          </table:table-cell>
          <table:table-cell office:value-type="string" calcext:value-type="string">
            <text:p>4-49</text:p>
          </table:table-cell>
          <table:table-cell office:value-type="float" office:value="49" calcext:value-type="float">
            <text:p>49</text:p>
          </table:table-cell>
          <table:table-cell office:value-type="string" calcext:value-type="string">
            <text:p>蝦夷共和国</text:p>
          </table:table-cell>
          <table:table-cell office:value-type="string" calcext:value-type="string">
            <text:p>えぞきょうわこく</text:p>
          </table:table-cell>
          <table:table-cell office:value-type="string" calcext:value-type="string">
            <text:p>第４弾ブースターパック</text:p>
          </table:table-cell>
          <table:table-cell table:formula="of:=VLOOKUP([.G358];[$収録番号.$A$1:$収録番号.$B$9];2;0)" office:value-type="float" office:value="45" calcext:value-type="float">
            <text:p>45</text:p>
          </table:table-cell>
          <table:table-cell office:value-type="string" calcext:value-type="string">
            <text:p>N</text:p>
          </table:table-cell>
          <table:table-cell table:formula="of:=VLOOKUP([.I358];[$レアリティ番号.$A$1:$レアリティ番号.$B$4];2;0)" office:value-type="float" office:value="1" calcext:value-type="float">
            <text:p>1</text:p>
          </table:table-cell>
          <table:table-cell office:value-type="string" calcext:value-type="string">
            <text:p>ハイケイ</text:p>
          </table:table-cell>
          <table:table-cell table:formula="of:=VLOOKUP([.K358];[$種類番号.$A$1:$種類番号.$B$4];2;0)" office:value-type="float" office:value="2" calcext:value-type="float">
            <text:p>2</text:p>
          </table:table-cell>
          <table:table-cell office:value-type="string" calcext:value-type="string">
            <text:p>紫</text:p>
          </table:table-cell>
          <table:table-cell table:formula="of:=VLOOKUP([.M358];[$色番号.$A$1:$色番号.$B$10];2;0)" office:value-type="float" office:value="16" calcext:value-type="float">
            <text:p>16</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5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58];[$特性番号.$A$1:$特性番号.$B$8];2;0);0)" office:value-type="float" office:value="0" calcext:value-type="float">
            <text:p>0</text:p>
          </table:table-cell>
          <table:table-cell office:value-type="string" calcext:value-type="string">
            <text:p>これが戦場にある間、自分の戦場の「志願」イジンは「モータル」を得て、他の能力すべてを失う。この能力は能力によって失われない。¶ガーディアンが自分の戦場にいない間、自分の戦場のレベル4以下のイジンは「特性：志願」を得る。</text:p>
          </table:table-cell>
          <table:table-cell table:style-name="ce8" table:formula="of:=NA()" office:value-type="string" office:string-value="" calcext:value-type="error">
            <text:p>#N/A</text:p>
          </table:table-cell>
          <table:table-cell table:formula="of:=IFERROR(VLOOKUP([.$V358];[$遺業能力番号.$A$1:$遺業能力番号.$B$9];2;0);0)" office:value-type="float" office:value="0" calcext:value-type="float">
            <text:p>0</text:p>
          </table:table-cell>
          <table:table-cell office:value-type="string" calcext:value-type="string">
            <text:p>https://one-draw.jp/ijinden/cardlist/004/card/04_049.png</text:p>
          </table:table-cell>
          <table:table-cell table:formula="of:=CONCATENATE([$JSON.$A$1];[.$C358];[$JSON.$B$1];[.$E358];[$JSON.$C$1];[.$F358];[$JSON.$D$1];IF(ISNA([.$S358]);&quot;null&quot;;&quot;&quot;&quot;&quot;&amp;[.$S358]&amp;&quot;&quot;&quot;&quot;);[$JSON.$E$1];[.$U358];[$JSON.$F$1];IF(ISNA([.$V358]);&quot;null&quot;;&quot;&quot;&quot;&quot;&amp;[.$V358]&amp;&quot;&quot;&quot;&quot;);[$JSON.$G$1];[.$X358];[$JSON.$H$1];[.$H358];[$JSON.$I$1];[.J358];[$JSON.$J$1];[.$L358];[$JSON.$K$1];[.$O358];[$JSON.$L$1];[.$N358];[$JSON.$M$1];[.$R358];[$JSON.$N$1];[.$T358];[$JSON.$O$1];[.$W358];[$JSON.$P$1];[.$A358];[$JSON.$Q$1];[.$B358];[$JSON.$R$1])" office:value-type="string" office:string-value="{&quot;id&quot;:&quot;4-49&quot;,&quot;name&quot;:&quot;蝦夷共和国&quot;,&quot;kana&quot;:&quot;えぞきょうわこく&quot;,&quot;traitText&quot;:null,&quot;ruleText&quot;:&quot;これが戦場にある間、自分の戦場の「志願」イジンは「モータル」を得て、他の能力すべてを失う。この能力は能力によって失われない。¶ガーディアンが自分の戦場にいない間、自分の戦場のレベル4以下のイジンは「特性：志願」を得る。&quot;,&quot;legacyText&quot;:null,&quot;imageUrl&quot;:&quot;https://one-draw.jp/ijinden/cardlist/004/card/04_049.png&quot;,&quot;expansion&quot;:45,&quot;rarity&quot;:1,&quot;type&quot;:2,&quot;level&quot;:5,&quot;color&quot;:16,&quot;term&quot;:0,&quot;trait&quot;:0,&quot;legacy&quot;:0,&quot;orderTable&quot;:358,&quot;orderDeck&quot;:272}," calcext:value-type="string">
            <text:p>{"id":"4-49","name":"蝦夷共和国","kana":"えぞきょうわこく","traitText":null,"ruleText":"これが戦場にある間、自分の戦場の「志願」イジンは「モータル」を得て、他の能力すべてを失う。この能力は能力によって失われない。¶ガーディアンが自分の戦場にいない間、自分の戦場のレベル4以下のイジンは「特性：志願」を得る。","legacyText":null,"imageUrl":"https://one-draw.jp/ijinden/cardlist/004/card/04_049.png","expansion":45,"rarity":1,"type":2,"level":5,"color":16,"term":0,"trait":0,"legacy":0,"orderTable":358,"orderDeck":272},</text:p>
          </table:table-cell>
          <table:table-cell table:number-columns-repeated="16347"/>
        </table:table-row>
        <table:table-row table:style-name="ro2">
          <table:table-cell office:value-type="float" office:value="359" calcext:value-type="float">
            <text:p>359</text:p>
          </table:table-cell>
          <table:table-cell office:value-type="float" office:value="273" calcext:value-type="float">
            <text:p>273</text:p>
          </table:table-cell>
          <table:table-cell office:value-type="string" calcext:value-type="string">
            <text:p>4-50</text:p>
          </table:table-cell>
          <table:table-cell office:value-type="float" office:value="50" calcext:value-type="float">
            <text:p>50</text:p>
          </table:table-cell>
          <table:table-cell office:value-type="string" calcext:value-type="string">
            <text:p>喀血の流行り病</text:p>
          </table:table-cell>
          <table:table-cell office:value-type="string" calcext:value-type="string">
            <text:p>かっけつのはやりやまい</text:p>
          </table:table-cell>
          <table:table-cell office:value-type="string" calcext:value-type="string">
            <text:p>第４弾ブースターパック</text:p>
          </table:table-cell>
          <table:table-cell table:formula="of:=VLOOKUP([.G359];[$収録番号.$A$1:$収録番号.$B$9];2;0)" office:value-type="float" office:value="45" calcext:value-type="float">
            <text:p>45</text:p>
          </table:table-cell>
          <table:table-cell office:value-type="string" calcext:value-type="string">
            <text:p>N</text:p>
          </table:table-cell>
          <table:table-cell table:formula="of:=VLOOKUP([.I359];[$レアリティ番号.$A$1:$レアリティ番号.$B$4];2;0)" office:value-type="float" office:value="1" calcext:value-type="float">
            <text:p>1</text:p>
          </table:table-cell>
          <table:table-cell office:value-type="string" calcext:value-type="string">
            <text:p>ハイケイ</text:p>
          </table:table-cell>
          <table:table-cell table:formula="of:=VLOOKUP([.K359];[$種類番号.$A$1:$種類番号.$B$4];2;0)" office:value-type="float" office:value="2" calcext:value-type="float">
            <text:p>2</text:p>
          </table:table-cell>
          <table:table-cell office:value-type="string" calcext:value-type="string">
            <text:p>紫</text:p>
          </table:table-cell>
          <table:table-cell table:formula="of:=VLOOKUP([.M359];[$色番号.$A$1:$色番号.$B$10];2;0)" office:value-type="float" office:value="16" calcext:value-type="float">
            <text:p>16</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5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59];[$特性番号.$A$1:$特性番号.$B$8];2;0);0)" office:value-type="float" office:value="0" calcext:value-type="float">
            <text:p>0</text:p>
          </table:table-cell>
          <table:table-cell office:value-type="string" calcext:value-type="string">
            <text:p>メインフェイズが開始したとき、ターンプレイヤーの戦場にイジンがいないなら、これを破壊する。そうでなければ、ターンプレイヤーの戦場のイジン1体を破壊する。そのイジンはターンプレイヤーが選ぶ。</text:p>
          </table:table-cell>
          <table:table-cell table:style-name="ce8" table:formula="of:=NA()" office:value-type="string" office:string-value="" calcext:value-type="error">
            <text:p>#N/A</text:p>
          </table:table-cell>
          <table:table-cell table:formula="of:=IFERROR(VLOOKUP([.$V359];[$遺業能力番号.$A$1:$遺業能力番号.$B$9];2;0);0)" office:value-type="float" office:value="0" calcext:value-type="float">
            <text:p>0</text:p>
          </table:table-cell>
          <table:table-cell office:value-type="string" calcext:value-type="string">
            <text:p>https://one-draw.jp/ijinden/cardlist/004/card/04_050.png</text:p>
          </table:table-cell>
          <table:table-cell table:formula="of:=CONCATENATE([$JSON.$A$1];[.$C359];[$JSON.$B$1];[.$E359];[$JSON.$C$1];[.$F359];[$JSON.$D$1];IF(ISNA([.$S359]);&quot;null&quot;;&quot;&quot;&quot;&quot;&amp;[.$S359]&amp;&quot;&quot;&quot;&quot;);[$JSON.$E$1];[.$U359];[$JSON.$F$1];IF(ISNA([.$V359]);&quot;null&quot;;&quot;&quot;&quot;&quot;&amp;[.$V359]&amp;&quot;&quot;&quot;&quot;);[$JSON.$G$1];[.$X359];[$JSON.$H$1];[.$H359];[$JSON.$I$1];[.J359];[$JSON.$J$1];[.$L359];[$JSON.$K$1];[.$O359];[$JSON.$L$1];[.$N359];[$JSON.$M$1];[.$R359];[$JSON.$N$1];[.$T359];[$JSON.$O$1];[.$W359];[$JSON.$P$1];[.$A359];[$JSON.$Q$1];[.$B359];[$JSON.$R$1])" office:value-type="string" office:string-value="{&quot;id&quot;:&quot;4-50&quot;,&quot;name&quot;:&quot;喀血の流行り病&quot;,&quot;kana&quot;:&quot;かっけつのはやりやまい&quot;,&quot;traitText&quot;:null,&quot;ruleText&quot;:&quot;メインフェイズが開始したとき、ターンプレイヤーの戦場にイジンがいないなら、これを破壊する。そうでなければ、ターンプレイヤーの戦場のイジン1体を破壊する。そのイジンはターンプレイヤーが選ぶ。&quot;,&quot;legacyText&quot;:null,&quot;imageUrl&quot;:&quot;https://one-draw.jp/ijinden/cardlist/004/card/04_050.png&quot;,&quot;expansion&quot;:45,&quot;rarity&quot;:1,&quot;type&quot;:2,&quot;level&quot;:5,&quot;color&quot;:16,&quot;term&quot;:0,&quot;trait&quot;:0,&quot;legacy&quot;:0,&quot;orderTable&quot;:359,&quot;orderDeck&quot;:273}," calcext:value-type="string">
            <text:p>{"id":"4-50","name":"喀血の流行り病","kana":"かっけつのはやりやまい","traitText":null,"ruleText":"メインフェイズが開始したとき、ターンプレイヤーの戦場にイジンがいないなら、これを破壊する。そうでなければ、ターンプレイヤーの戦場のイジン1体を破壊する。そのイジンはターンプレイヤーが選ぶ。","legacyText":null,"imageUrl":"https://one-draw.jp/ijinden/cardlist/004/card/04_050.png","expansion":45,"rarity":1,"type":2,"level":5,"color":16,"term":0,"trait":0,"legacy":0,"orderTable":359,"orderDeck":273},</text:p>
          </table:table-cell>
          <table:table-cell table:number-columns-repeated="16347"/>
        </table:table-row>
        <table:table-row table:style-name="ro2">
          <table:table-cell office:value-type="float" office:value="360" calcext:value-type="float">
            <text:p>360</text:p>
          </table:table-cell>
          <table:table-cell office:value-type="float" office:value="282" calcext:value-type="float">
            <text:p>282</text:p>
          </table:table-cell>
          <table:table-cell office:value-type="string" calcext:value-type="string">
            <text:p>4-51</text:p>
          </table:table-cell>
          <table:table-cell office:value-type="float" office:value="51" calcext:value-type="float">
            <text:p>51</text:p>
          </table:table-cell>
          <table:table-cell office:value-type="string" calcext:value-type="string">
            <text:p>カーバナイズ</text:p>
          </table:table-cell>
          <table:table-cell office:value-type="string" calcext:value-type="string">
            <text:p>かーばないず</text:p>
          </table:table-cell>
          <table:table-cell office:value-type="string" calcext:value-type="string">
            <text:p>第４弾ブースターパック</text:p>
          </table:table-cell>
          <table:table-cell table:formula="of:=VLOOKUP([.G360];[$収録番号.$A$1:$収録番号.$B$9];2;0)" office:value-type="float" office:value="45" calcext:value-type="float">
            <text:p>45</text:p>
          </table:table-cell>
          <table:table-cell office:value-type="string" calcext:value-type="string">
            <text:p>N</text:p>
          </table:table-cell>
          <table:table-cell table:formula="of:=VLOOKUP([.I360];[$レアリティ番号.$A$1:$レアリティ番号.$B$4];2;0)" office:value-type="float" office:value="1" calcext:value-type="float">
            <text:p>1</text:p>
          </table:table-cell>
          <table:table-cell office:value-type="string" calcext:value-type="string">
            <text:p>マホウ</text:p>
          </table:table-cell>
          <table:table-cell table:formula="of:=VLOOKUP([.K360];[$種類番号.$A$1:$種類番号.$B$4];2;0)" office:value-type="float" office:value="3" calcext:value-type="float">
            <text:p>3</text:p>
          </table:table-cell>
          <table:table-cell office:value-type="string" calcext:value-type="string">
            <text:p>赤</text:p>
          </table:table-cell>
          <table:table-cell table:formula="of:=VLOOKUP([.M360];[$色番号.$A$1:$色番号.$B$10];2;0)" office:value-type="float" office:value="1" calcext:value-type="float">
            <text:p>1</text:p>
          </table:table-cell>
          <table:table-cell table:number-columns-repeated="2" office:value-type="float" office:value="1" calcext:value-type="float">
            <text:p>1</text:p>
          </table:table-cell>
          <table:table-cell table:formula="of:=NA()" office:value-type="string" office:string-value="" calcext:value-type="error">
            <text:p>#N/A</text:p>
          </table:table-cell>
          <table:table-cell table:formula="of:=IFERROR(VLOOKUP([.$Q36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60];[$特性番号.$A$1:$特性番号.$B$8];2;0);0)" office:value-type="float" office:value="0" calcext:value-type="float">
            <text:p>0</text:p>
          </table:table-cell>
          <table:table-cell office:value-type="string" calcext:value-type="string">
            <text:p>戦場のハイケイ1つか、戦場の装備されているカード1つを指定して発動できる。そのカードを破壊する。この能力によって破壊されたカードは、墓地に置かれる代わりに山札の下に戻される。</text:p>
          </table:table-cell>
          <table:table-cell table:style-name="ce8" office:value-type="string" calcext:value-type="string">
            <text:p>冥府発動</text:p>
          </table:table-cell>
          <table:table-cell table:formula="of:=IFERROR(VLOOKUP([.$V360];[$遺業能力番号.$A$1:$遺業能力番号.$B$9];2;0);0)" office:value-type="float" office:value="2" calcext:value-type="float">
            <text:p>2</text:p>
          </table:table-cell>
          <table:table-cell office:value-type="string" calcext:value-type="string">
            <text:p>https://one-draw.jp/ijinden/cardlist/004/card/04_051.png</text:p>
          </table:table-cell>
          <table:table-cell table:formula="of:=CONCATENATE([$JSON.$A$1];[.$C360];[$JSON.$B$1];[.$E360];[$JSON.$C$1];[.$F360];[$JSON.$D$1];IF(ISNA([.$S360]);&quot;null&quot;;&quot;&quot;&quot;&quot;&amp;[.$S360]&amp;&quot;&quot;&quot;&quot;);[$JSON.$E$1];[.$U360];[$JSON.$F$1];IF(ISNA([.$V360]);&quot;null&quot;;&quot;&quot;&quot;&quot;&amp;[.$V360]&amp;&quot;&quot;&quot;&quot;);[$JSON.$G$1];[.$X360];[$JSON.$H$1];[.$H360];[$JSON.$I$1];[.J360];[$JSON.$J$1];[.$L360];[$JSON.$K$1];[.$O360];[$JSON.$L$1];[.$N360];[$JSON.$M$1];[.$R360];[$JSON.$N$1];[.$T360];[$JSON.$O$1];[.$W360];[$JSON.$P$1];[.$A360];[$JSON.$Q$1];[.$B360];[$JSON.$R$1])" office:value-type="string" office:string-value="{&quot;id&quot;:&quot;4-51&quot;,&quot;name&quot;:&quot;カーバナイズ&quot;,&quot;kana&quot;:&quot;かーばないず&quot;,&quot;traitText&quot;:null,&quot;ruleText&quot;:&quot;戦場のハイケイ1つか、戦場の装備されているカード1つを指定して発動できる。そのカードを破壊する。この能力によって破壊されたカードは、墓地に置かれる代わりに山札の下に戻される。&quot;,&quot;legacyText&quot;:&quot;冥府発動&quot;,&quot;imageUrl&quot;:&quot;https://one-draw.jp/ijinden/cardlist/004/card/04_051.png&quot;,&quot;expansion&quot;:45,&quot;rarity&quot;:1,&quot;type&quot;:3,&quot;level&quot;:1,&quot;color&quot;:1,&quot;term&quot;:0,&quot;trait&quot;:0,&quot;legacy&quot;:2,&quot;orderTable&quot;:360,&quot;orderDeck&quot;:282}," calcext:value-type="string">
            <text:p>{"id":"4-51","name":"カーバナイズ","kana":"かーばないず","traitText":null,"ruleText":"戦場のハイケイ1つか、戦場の装備されているカード1つを指定して発動できる。そのカードを破壊する。この能力によって破壊されたカードは、墓地に置かれる代わりに山札の下に戻される。","legacyText":"冥府発動","imageUrl":"https://one-draw.jp/ijinden/cardlist/004/card/04_051.png","expansion":45,"rarity":1,"type":3,"level":1,"color":1,"term":0,"trait":0,"legacy":2,"orderTable":360,"orderDeck":282},</text:p>
          </table:table-cell>
          <table:table-cell table:number-columns-repeated="16347"/>
        </table:table-row>
        <table:table-row table:style-name="ro2">
          <table:table-cell office:value-type="float" office:value="361" calcext:value-type="float">
            <text:p>361</text:p>
          </table:table-cell>
          <table:table-cell office:value-type="float" office:value="325" calcext:value-type="float">
            <text:p>325</text:p>
          </table:table-cell>
          <table:table-cell office:value-type="string" calcext:value-type="string">
            <text:p>4-52</text:p>
          </table:table-cell>
          <table:table-cell office:value-type="float" office:value="52" calcext:value-type="float">
            <text:p>52</text:p>
          </table:table-cell>
          <table:table-cell office:value-type="string" calcext:value-type="string">
            <text:p>ソーラーフレア</text:p>
          </table:table-cell>
          <table:table-cell office:value-type="string" calcext:value-type="string">
            <text:p>そーらーふれあ</text:p>
          </table:table-cell>
          <table:table-cell office:value-type="string" calcext:value-type="string">
            <text:p>第４弾ブースターパック</text:p>
          </table:table-cell>
          <table:table-cell table:formula="of:=VLOOKUP([.G361];[$収録番号.$A$1:$収録番号.$B$9];2;0)" office:value-type="float" office:value="45" calcext:value-type="float">
            <text:p>45</text:p>
          </table:table-cell>
          <table:table-cell office:value-type="string" calcext:value-type="string">
            <text:p>N</text:p>
          </table:table-cell>
          <table:table-cell table:formula="of:=VLOOKUP([.I361];[$レアリティ番号.$A$1:$レアリティ番号.$B$4];2;0)" office:value-type="float" office:value="1" calcext:value-type="float">
            <text:p>1</text:p>
          </table:table-cell>
          <table:table-cell office:value-type="string" calcext:value-type="string">
            <text:p>マホウ</text:p>
          </table:table-cell>
          <table:table-cell table:formula="of:=VLOOKUP([.K361];[$種類番号.$A$1:$種類番号.$B$4];2;0)" office:value-type="float" office:value="3" calcext:value-type="float">
            <text:p>3</text:p>
          </table:table-cell>
          <table:table-cell office:value-type="string" calcext:value-type="string">
            <text:p>赤</text:p>
          </table:table-cell>
          <table:table-cell table:formula="of:=VLOOKUP([.M361];[$色番号.$A$1:$色番号.$B$10];2;0)" office:value-type="float" office:value="1" calcext:value-type="float">
            <text:p>1</text:p>
          </table:table-cell>
          <table:table-cell office:value-type="float" office:value="5" calcext:value-type="float">
            <text:p>5</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Q36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61];[$特性番号.$A$1:$特性番号.$B$8];2;0);0)" office:value-type="float" office:value="0" calcext:value-type="float">
            <text:p>0</text:p>
          </table:table-cell>
          <table:table-cell office:value-type="string" calcext:value-type="string">
            <text:p>以下から1つを発動する。¶・相手は、このターンに限り「自分の魔力ゾーンの能力は発動しない」を得る。¶・自分の手札の他のカード1つを墓地に置いて、1ドローする。</text:p>
          </table:table-cell>
          <table:table-cell table:style-name="ce8" office:value-type="string" calcext:value-type="string">
            <text:p>冥府発動</text:p>
          </table:table-cell>
          <table:table-cell table:formula="of:=IFERROR(VLOOKUP([.$V361];[$遺業能力番号.$A$1:$遺業能力番号.$B$9];2;0);0)" office:value-type="float" office:value="2" calcext:value-type="float">
            <text:p>2</text:p>
          </table:table-cell>
          <table:table-cell office:value-type="string" calcext:value-type="string">
            <text:p>https://one-draw.jp/ijinden/cardlist/004/card/04_052.png</text:p>
          </table:table-cell>
          <table:table-cell table:formula="of:=CONCATENATE([$JSON.$A$1];[.$C361];[$JSON.$B$1];[.$E361];[$JSON.$C$1];[.$F361];[$JSON.$D$1];IF(ISNA([.$S361]);&quot;null&quot;;&quot;&quot;&quot;&quot;&amp;[.$S361]&amp;&quot;&quot;&quot;&quot;);[$JSON.$E$1];[.$U361];[$JSON.$F$1];IF(ISNA([.$V361]);&quot;null&quot;;&quot;&quot;&quot;&quot;&amp;[.$V361]&amp;&quot;&quot;&quot;&quot;);[$JSON.$G$1];[.$X361];[$JSON.$H$1];[.$H361];[$JSON.$I$1];[.J361];[$JSON.$J$1];[.$L361];[$JSON.$K$1];[.$O361];[$JSON.$L$1];[.$N361];[$JSON.$M$1];[.$R361];[$JSON.$N$1];[.$T361];[$JSON.$O$1];[.$W361];[$JSON.$P$1];[.$A361];[$JSON.$Q$1];[.$B361];[$JSON.$R$1])" office:value-type="string" office:string-value="{&quot;id&quot;:&quot;4-52&quot;,&quot;name&quot;:&quot;ソーラーフレア&quot;,&quot;kana&quot;:&quot;そーらーふれあ&quot;,&quot;traitText&quot;:null,&quot;ruleText&quot;:&quot;以下から1つを発動する。¶・相手は、このターンに限り「自分の魔力ゾーンの能力は発動しない」を得る。¶・自分の手札の他のカード1つを墓地に置いて、1ドローする。&quot;,&quot;legacyText&quot;:&quot;冥府発動&quot;,&quot;imageUrl&quot;:&quot;https://one-draw.jp/ijinden/cardlist/004/card/04_052.png&quot;,&quot;expansion&quot;:45,&quot;rarity&quot;:1,&quot;type&quot;:3,&quot;level&quot;:5,&quot;color&quot;:1,&quot;term&quot;:0,&quot;trait&quot;:0,&quot;legacy&quot;:2,&quot;orderTable&quot;:361,&quot;orderDeck&quot;:325}," calcext:value-type="string">
            <text:p>{"id":"4-52","name":"ソーラーフレア","kana":"そーらーふれあ","traitText":null,"ruleText":"以下から1つを発動する。¶・相手は、このターンに限り「自分の魔力ゾーンの能力は発動しない」を得る。¶・自分の手札の他のカード1つを墓地に置いて、1ドローする。","legacyText":"冥府発動","imageUrl":"https://one-draw.jp/ijinden/cardlist/004/card/04_052.png","expansion":45,"rarity":1,"type":3,"level":5,"color":1,"term":0,"trait":0,"legacy":2,"orderTable":361,"orderDeck":325},</text:p>
          </table:table-cell>
          <table:table-cell table:number-columns-repeated="16347"/>
        </table:table-row>
        <table:table-row table:style-name="ro2">
          <table:table-cell office:value-type="float" office:value="362" calcext:value-type="float">
            <text:p>362</text:p>
          </table:table-cell>
          <table:table-cell office:value-type="float" office:value="281" calcext:value-type="float">
            <text:p>281</text:p>
          </table:table-cell>
          <table:table-cell office:value-type="string" calcext:value-type="string">
            <text:p>4-53</text:p>
          </table:table-cell>
          <table:table-cell office:value-type="float" office:value="53" calcext:value-type="float">
            <text:p>53</text:p>
          </table:table-cell>
          <table:table-cell office:value-type="string" calcext:value-type="string">
            <text:p>フール</text:p>
          </table:table-cell>
          <table:table-cell office:value-type="string" calcext:value-type="string">
            <text:p>ふーる</text:p>
          </table:table-cell>
          <table:table-cell office:value-type="string" calcext:value-type="string">
            <text:p>第４弾ブースターパック</text:p>
          </table:table-cell>
          <table:table-cell table:formula="of:=VLOOKUP([.G362];[$収録番号.$A$1:$収録番号.$B$9];2;0)" office:value-type="float" office:value="45" calcext:value-type="float">
            <text:p>45</text:p>
          </table:table-cell>
          <table:table-cell office:value-type="string" calcext:value-type="string">
            <text:p>N</text:p>
          </table:table-cell>
          <table:table-cell table:formula="of:=VLOOKUP([.I362];[$レアリティ番号.$A$1:$レアリティ番号.$B$4];2;0)" office:value-type="float" office:value="1" calcext:value-type="float">
            <text:p>1</text:p>
          </table:table-cell>
          <table:table-cell office:value-type="string" calcext:value-type="string">
            <text:p>マホウ</text:p>
          </table:table-cell>
          <table:table-cell table:formula="of:=VLOOKUP([.K362];[$種類番号.$A$1:$種類番号.$B$4];2;0)" office:value-type="float" office:value="3" calcext:value-type="float">
            <text:p>3</text:p>
          </table:table-cell>
          <table:table-cell office:value-type="string" calcext:value-type="string">
            <text:p>青</text:p>
          </table:table-cell>
          <table:table-cell table:formula="of:=VLOOKUP([.M362];[$色番号.$A$1:$色番号.$B$10];2;0)" office:value-type="float" office:value="2" calcext:value-type="float">
            <text:p>2</text:p>
          </table:table-cell>
          <table:table-cell table:number-columns-repeated="2" office:value-type="float" office:value="0" calcext:value-type="float">
            <text:p>0</text:p>
          </table:table-cell>
          <table:table-cell table:formula="of:=NA()" office:value-type="string" office:string-value="" calcext:value-type="error">
            <text:p>#N/A</text:p>
          </table:table-cell>
          <table:table-cell table:formula="of:=IFERROR(VLOOKUP([.$Q36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62];[$特性番号.$A$1:$特性番号.$B$8];2;0);0)" office:value-type="float" office:value="0" calcext:value-type="float">
            <text:p>0</text:p>
          </table:table-cell>
          <table:table-cell office:value-type="string" calcext:value-type="string">
            <text:p>自分の墓地のマホウのレベルの合計が1以上なら、自分の手札の他のカード1つを墓地に置く。そうでなければ、1ドローする。</text:p>
          </table:table-cell>
          <table:table-cell table:style-name="ce8" office:value-type="string" calcext:value-type="string">
            <text:p>1ドローする</text:p>
          </table:table-cell>
          <table:table-cell table:formula="of:=IFERROR(VLOOKUP([.$V362];[$遺業能力番号.$A$1:$遺業能力番号.$B$9];2;0);0)" office:value-type="float" office:value="4" calcext:value-type="float">
            <text:p>4</text:p>
          </table:table-cell>
          <table:table-cell office:value-type="string" calcext:value-type="string">
            <text:p>https://one-draw.jp/ijinden/cardlist/004/card/04_053.png</text:p>
          </table:table-cell>
          <table:table-cell table:formula="of:=CONCATENATE([$JSON.$A$1];[.$C362];[$JSON.$B$1];[.$E362];[$JSON.$C$1];[.$F362];[$JSON.$D$1];IF(ISNA([.$S362]);&quot;null&quot;;&quot;&quot;&quot;&quot;&amp;[.$S362]&amp;&quot;&quot;&quot;&quot;);[$JSON.$E$1];[.$U362];[$JSON.$F$1];IF(ISNA([.$V362]);&quot;null&quot;;&quot;&quot;&quot;&quot;&amp;[.$V362]&amp;&quot;&quot;&quot;&quot;);[$JSON.$G$1];[.$X362];[$JSON.$H$1];[.$H362];[$JSON.$I$1];[.J362];[$JSON.$J$1];[.$L362];[$JSON.$K$1];[.$O362];[$JSON.$L$1];[.$N362];[$JSON.$M$1];[.$R362];[$JSON.$N$1];[.$T362];[$JSON.$O$1];[.$W362];[$JSON.$P$1];[.$A362];[$JSON.$Q$1];[.$B362];[$JSON.$R$1])" office:value-type="string" office:string-value="{&quot;id&quot;:&quot;4-53&quot;,&quot;name&quot;:&quot;フール&quot;,&quot;kana&quot;:&quot;ふーる&quot;,&quot;traitText&quot;:null,&quot;ruleText&quot;:&quot;自分の墓地のマホウのレベルの合計が1以上なら、自分の手札の他のカード1つを墓地に置く。そうでなければ、1ドローする。&quot;,&quot;legacyText&quot;:&quot;1ドローする&quot;,&quot;imageUrl&quot;:&quot;https://one-draw.jp/ijinden/cardlist/004/card/04_053.png&quot;,&quot;expansion&quot;:45,&quot;rarity&quot;:1,&quot;type&quot;:3,&quot;level&quot;:0,&quot;color&quot;:2,&quot;term&quot;:0,&quot;trait&quot;:0,&quot;legacy&quot;:4,&quot;orderTable&quot;:362,&quot;orderDeck&quot;:281}," calcext:value-type="string">
            <text:p>{"id":"4-53","name":"フール","kana":"ふーる","traitText":null,"ruleText":"自分の墓地のマホウのレベルの合計が1以上なら、自分の手札の他のカード1つを墓地に置く。そうでなければ、1ドローする。","legacyText":"1ドローする","imageUrl":"https://one-draw.jp/ijinden/cardlist/004/card/04_053.png","expansion":45,"rarity":1,"type":3,"level":0,"color":2,"term":0,"trait":0,"legacy":4,"orderTable":362,"orderDeck":281},</text:p>
          </table:table-cell>
          <table:table-cell table:number-columns-repeated="16347"/>
        </table:table-row>
        <table:table-row table:style-name="ro2">
          <table:table-cell office:value-type="float" office:value="363" calcext:value-type="float">
            <text:p>363</text:p>
          </table:table-cell>
          <table:table-cell office:value-type="float" office:value="283" calcext:value-type="float">
            <text:p>283</text:p>
          </table:table-cell>
          <table:table-cell office:value-type="string" calcext:value-type="string">
            <text:p>4-54</text:p>
          </table:table-cell>
          <table:table-cell office:value-type="float" office:value="54" calcext:value-type="float">
            <text:p>54</text:p>
          </table:table-cell>
          <table:table-cell office:value-type="string" calcext:value-type="string">
            <text:p>ドロレス</text:p>
          </table:table-cell>
          <table:table-cell office:value-type="string" calcext:value-type="string">
            <text:p>どろれす</text:p>
          </table:table-cell>
          <table:table-cell office:value-type="string" calcext:value-type="string">
            <text:p>第４弾ブースターパック</text:p>
          </table:table-cell>
          <table:table-cell table:formula="of:=VLOOKUP([.G363];[$収録番号.$A$1:$収録番号.$B$9];2;0)" office:value-type="float" office:value="45" calcext:value-type="float">
            <text:p>45</text:p>
          </table:table-cell>
          <table:table-cell office:value-type="string" calcext:value-type="string">
            <text:p>N</text:p>
          </table:table-cell>
          <table:table-cell table:formula="of:=VLOOKUP([.I363];[$レアリティ番号.$A$1:$レアリティ番号.$B$4];2;0)" office:value-type="float" office:value="1" calcext:value-type="float">
            <text:p>1</text:p>
          </table:table-cell>
          <table:table-cell office:value-type="string" calcext:value-type="string">
            <text:p>マホウ</text:p>
          </table:table-cell>
          <table:table-cell table:formula="of:=VLOOKUP([.K363];[$種類番号.$A$1:$種類番号.$B$4];2;0)" office:value-type="float" office:value="3" calcext:value-type="float">
            <text:p>3</text:p>
          </table:table-cell>
          <table:table-cell office:value-type="string" calcext:value-type="string">
            <text:p>青</text:p>
          </table:table-cell>
          <table:table-cell table:formula="of:=VLOOKUP([.M363];[$色番号.$A$1:$色番号.$B$10];2;0)" office:value-type="float" office:value="2" calcext:value-type="float">
            <text:p>2</text:p>
          </table:table-cell>
          <table:table-cell table:number-columns-repeated="2" office:value-type="float" office:value="1" calcext:value-type="float">
            <text:p>1</text:p>
          </table:table-cell>
          <table:table-cell table:formula="of:=NA()" office:value-type="string" office:string-value="" calcext:value-type="error">
            <text:p>#N/A</text:p>
          </table:table-cell>
          <table:table-cell table:formula="of:=IFERROR(VLOOKUP([.$Q36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63];[$特性番号.$A$1:$特性番号.$B$8];2;0);0)" office:value-type="float" office:value="0" calcext:value-type="float">
            <text:p>0</text:p>
          </table:table-cell>
          <table:table-cell office:value-type="string" calcext:value-type="string">
            <text:p>相手の手札を見てレベル3以上のカード1つを墓地に置く。</text:p>
          </table:table-cell>
          <table:table-cell table:style-name="ce8" office:value-type="string" calcext:value-type="string">
            <text:p>冥府発動</text:p>
          </table:table-cell>
          <table:table-cell table:formula="of:=IFERROR(VLOOKUP([.$V363];[$遺業能力番号.$A$1:$遺業能力番号.$B$9];2;0);0)" office:value-type="float" office:value="2" calcext:value-type="float">
            <text:p>2</text:p>
          </table:table-cell>
          <table:table-cell office:value-type="string" calcext:value-type="string">
            <text:p>https://one-draw.jp/ijinden/cardlist/004/card/04_054.png</text:p>
          </table:table-cell>
          <table:table-cell table:formula="of:=CONCATENATE([$JSON.$A$1];[.$C363];[$JSON.$B$1];[.$E363];[$JSON.$C$1];[.$F363];[$JSON.$D$1];IF(ISNA([.$S363]);&quot;null&quot;;&quot;&quot;&quot;&quot;&amp;[.$S363]&amp;&quot;&quot;&quot;&quot;);[$JSON.$E$1];[.$U363];[$JSON.$F$1];IF(ISNA([.$V363]);&quot;null&quot;;&quot;&quot;&quot;&quot;&amp;[.$V363]&amp;&quot;&quot;&quot;&quot;);[$JSON.$G$1];[.$X363];[$JSON.$H$1];[.$H363];[$JSON.$I$1];[.J363];[$JSON.$J$1];[.$L363];[$JSON.$K$1];[.$O363];[$JSON.$L$1];[.$N363];[$JSON.$M$1];[.$R363];[$JSON.$N$1];[.$T363];[$JSON.$O$1];[.$W363];[$JSON.$P$1];[.$A363];[$JSON.$Q$1];[.$B363];[$JSON.$R$1])" office:value-type="string" office:string-value="{&quot;id&quot;:&quot;4-54&quot;,&quot;name&quot;:&quot;ドロレス&quot;,&quot;kana&quot;:&quot;どろれす&quot;,&quot;traitText&quot;:null,&quot;ruleText&quot;:&quot;相手の手札を見てレベル3以上のカード1つを墓地に置く。&quot;,&quot;legacyText&quot;:&quot;冥府発動&quot;,&quot;imageUrl&quot;:&quot;https://one-draw.jp/ijinden/cardlist/004/card/04_054.png&quot;,&quot;expansion&quot;:45,&quot;rarity&quot;:1,&quot;type&quot;:3,&quot;level&quot;:1,&quot;color&quot;:2,&quot;term&quot;:0,&quot;trait&quot;:0,&quot;legacy&quot;:2,&quot;orderTable&quot;:363,&quot;orderDeck&quot;:283}," calcext:value-type="string">
            <text:p>{"id":"4-54","name":"ドロレス","kana":"どろれす","traitText":null,"ruleText":"相手の手札を見てレベル3以上のカード1つを墓地に置く。","legacyText":"冥府発動","imageUrl":"https://one-draw.jp/ijinden/cardlist/004/card/04_054.png","expansion":45,"rarity":1,"type":3,"level":1,"color":2,"term":0,"trait":0,"legacy":2,"orderTable":363,"orderDeck":283},</text:p>
          </table:table-cell>
          <table:table-cell table:number-columns-repeated="16347"/>
        </table:table-row>
        <table:table-row table:style-name="ro2">
          <table:table-cell office:value-type="float" office:value="364" calcext:value-type="float">
            <text:p>364</text:p>
          </table:table-cell>
          <table:table-cell office:value-type="float" office:value="327" calcext:value-type="float">
            <text:p>327</text:p>
          </table:table-cell>
          <table:table-cell office:value-type="string" calcext:value-type="string">
            <text:p>4-55</text:p>
          </table:table-cell>
          <table:table-cell office:value-type="float" office:value="55" calcext:value-type="float">
            <text:p>55</text:p>
          </table:table-cell>
          <table:table-cell office:value-type="string" calcext:value-type="string">
            <text:p>デュエル</text:p>
          </table:table-cell>
          <table:table-cell office:value-type="string" calcext:value-type="string">
            <text:p>でゅえる</text:p>
          </table:table-cell>
          <table:table-cell office:value-type="string" calcext:value-type="string">
            <text:p>第４弾ブースターパック</text:p>
          </table:table-cell>
          <table:table-cell table:formula="of:=VLOOKUP([.G364];[$収録番号.$A$1:$収録番号.$B$9];2;0)" office:value-type="float" office:value="45" calcext:value-type="float">
            <text:p>45</text:p>
          </table:table-cell>
          <table:table-cell office:value-type="string" calcext:value-type="string">
            <text:p>N</text:p>
          </table:table-cell>
          <table:table-cell table:formula="of:=VLOOKUP([.I364];[$レアリティ番号.$A$1:$レアリティ番号.$B$4];2;0)" office:value-type="float" office:value="1" calcext:value-type="float">
            <text:p>1</text:p>
          </table:table-cell>
          <table:table-cell office:value-type="string" calcext:value-type="string">
            <text:p>マホウ</text:p>
          </table:table-cell>
          <table:table-cell table:formula="of:=VLOOKUP([.K364];[$種類番号.$A$1:$種類番号.$B$4];2;0)" office:value-type="float" office:value="3" calcext:value-type="float">
            <text:p>3</text:p>
          </table:table-cell>
          <table:table-cell office:value-type="string" calcext:value-type="string">
            <text:p>緑</text:p>
          </table:table-cell>
          <table:table-cell table:formula="of:=VLOOKUP([.M364];[$色番号.$A$1:$色番号.$B$10];2;0)"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Q36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64];[$特性番号.$A$1:$特性番号.$B$8];2;0);0)" office:value-type="float" office:value="0" calcext:value-type="float">
            <text:p>0</text:p>
          </table:table-cell>
          <table:table-cell office:value-type="string" calcext:value-type="string">
            <text:p>自分の戦場の起きているイジン1体と、相手の戦場のイジン1体を指定して発動できる。パワーが高い方のイジンを寝かせて、低い方のイジンを墓地に置く。同じならどちらも寝かせる。</text:p>
          </table:table-cell>
          <table:table-cell table:style-name="ce8" office:value-type="string" calcext:value-type="string">
            <text:p>魔力化</text:p>
          </table:table-cell>
          <table:table-cell table:formula="of:=IFERROR(VLOOKUP([.$V364];[$遺業能力番号.$A$1:$遺業能力番号.$B$9];2;0);0)" office:value-type="float" office:value="1" calcext:value-type="float">
            <text:p>1</text:p>
          </table:table-cell>
          <table:table-cell office:value-type="string" calcext:value-type="string">
            <text:p>https://one-draw.jp/ijinden/cardlist/004/card/04_055.png</text:p>
          </table:table-cell>
          <table:table-cell table:formula="of:=CONCATENATE([$JSON.$A$1];[.$C364];[$JSON.$B$1];[.$E364];[$JSON.$C$1];[.$F364];[$JSON.$D$1];IF(ISNA([.$S364]);&quot;null&quot;;&quot;&quot;&quot;&quot;&amp;[.$S364]&amp;&quot;&quot;&quot;&quot;);[$JSON.$E$1];[.$U364];[$JSON.$F$1];IF(ISNA([.$V364]);&quot;null&quot;;&quot;&quot;&quot;&quot;&amp;[.$V364]&amp;&quot;&quot;&quot;&quot;);[$JSON.$G$1];[.$X364];[$JSON.$H$1];[.$H364];[$JSON.$I$1];[.J364];[$JSON.$J$1];[.$L364];[$JSON.$K$1];[.$O364];[$JSON.$L$1];[.$N364];[$JSON.$M$1];[.$R364];[$JSON.$N$1];[.$T364];[$JSON.$O$1];[.$W364];[$JSON.$P$1];[.$A364];[$JSON.$Q$1];[.$B364];[$JSON.$R$1])" office:value-type="string" office:string-value="{&quot;id&quot;:&quot;4-55&quot;,&quot;name&quot;:&quot;デュエル&quot;,&quot;kana&quot;:&quot;でゅえる&quot;,&quot;traitText&quot;:null,&quot;ruleText&quot;:&quot;自分の戦場の起きているイジン1体と、相手の戦場のイジン1体を指定して発動できる。パワーが高い方のイジンを寝かせて、低い方のイジンを墓地に置く。同じならどちらも寝かせる。&quot;,&quot;legacyText&quot;:&quot;魔力化&quot;,&quot;imageUrl&quot;:&quot;https://one-draw.jp/ijinden/cardlist/004/card/04_055.png&quot;,&quot;expansion&quot;:45,&quot;rarity&quot;:1,&quot;type&quot;:3,&quot;level&quot;:5,&quot;color&quot;:4,&quot;term&quot;:0,&quot;trait&quot;:0,&quot;legacy&quot;:1,&quot;orderTable&quot;:364,&quot;orderDeck&quot;:327}," calcext:value-type="string">
            <text:p>{"id":"4-55","name":"デュエル","kana":"でゅえる","traitText":null,"ruleText":"自分の戦場の起きているイジン1体と、相手の戦場のイジン1体を指定して発動できる。パワーが高い方のイジンを寝かせて、低い方のイジンを墓地に置く。同じならどちらも寝かせる。","legacyText":"魔力化","imageUrl":"https://one-draw.jp/ijinden/cardlist/004/card/04_055.png","expansion":45,"rarity":1,"type":3,"level":5,"color":4,"term":0,"trait":0,"legacy":1,"orderTable":364,"orderDeck":327},</text:p>
          </table:table-cell>
          <table:table-cell table:number-columns-repeated="16347"/>
        </table:table-row>
        <table:table-row table:style-name="ro2">
          <table:table-cell office:value-type="float" office:value="365" calcext:value-type="float">
            <text:p>365</text:p>
          </table:table-cell>
          <table:table-cell office:value-type="float" office:value="310" calcext:value-type="float">
            <text:p>310</text:p>
          </table:table-cell>
          <table:table-cell office:value-type="string" calcext:value-type="string">
            <text:p>4-56</text:p>
          </table:table-cell>
          <table:table-cell office:value-type="float" office:value="56" calcext:value-type="float">
            <text:p>56</text:p>
          </table:table-cell>
          <table:table-cell office:value-type="string" calcext:value-type="string">
            <text:p>サーベイング</text:p>
          </table:table-cell>
          <table:table-cell office:value-type="string" calcext:value-type="string">
            <text:p>さーべいんぐ</text:p>
          </table:table-cell>
          <table:table-cell office:value-type="string" calcext:value-type="string">
            <text:p>第４弾ブースターパック</text:p>
          </table:table-cell>
          <table:table-cell table:formula="of:=VLOOKUP([.G365];[$収録番号.$A$1:$収録番号.$B$9];2;0)" office:value-type="float" office:value="45" calcext:value-type="float">
            <text:p>45</text:p>
          </table:table-cell>
          <table:table-cell office:value-type="string" calcext:value-type="string">
            <text:p>N</text:p>
          </table:table-cell>
          <table:table-cell table:formula="of:=VLOOKUP([.I365];[$レアリティ番号.$A$1:$レアリティ番号.$B$4];2;0)" office:value-type="float" office:value="1" calcext:value-type="float">
            <text:p>1</text:p>
          </table:table-cell>
          <table:table-cell office:value-type="string" calcext:value-type="string">
            <text:p>マホウ</text:p>
          </table:table-cell>
          <table:table-cell table:formula="of:=VLOOKUP([.K365];[$種類番号.$A$1:$種類番号.$B$4];2;0)" office:value-type="float" office:value="3" calcext:value-type="float">
            <text:p>3</text:p>
          </table:table-cell>
          <table:table-cell office:value-type="string" calcext:value-type="string">
            <text:p>緑</text:p>
          </table:table-cell>
          <table:table-cell table:formula="of:=VLOOKUP([.M365];[$色番号.$A$1:$色番号.$B$10];2;0)"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36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65];[$特性番号.$A$1:$特性番号.$B$8];2;0);0)" office:value-type="float" office:value="0" calcext:value-type="float">
            <text:p>0</text:p>
          </table:table-cell>
          <table:table-cell office:value-type="string" calcext:value-type="string">
            <text:p>自分の手札のハイケイを1つ以上指定して発動できる。それらのハイケイすべてを墓地に置いて、墓地に置いたハイケイのレベルの合計5につき1ドローする。</text:p>
          </table:table-cell>
          <table:table-cell table:style-name="ce8" office:value-type="string" calcext:value-type="string">
            <text:p>魔力化</text:p>
          </table:table-cell>
          <table:table-cell table:formula="of:=IFERROR(VLOOKUP([.$V365];[$遺業能力番号.$A$1:$遺業能力番号.$B$9];2;0);0)" office:value-type="float" office:value="1" calcext:value-type="float">
            <text:p>1</text:p>
          </table:table-cell>
          <table:table-cell office:value-type="string" calcext:value-type="string">
            <text:p>https://one-draw.jp/ijinden/cardlist/004/card/04_056.png</text:p>
          </table:table-cell>
          <table:table-cell table:formula="of:=CONCATENATE([$JSON.$A$1];[.$C365];[$JSON.$B$1];[.$E365];[$JSON.$C$1];[.$F365];[$JSON.$D$1];IF(ISNA([.$S365]);&quot;null&quot;;&quot;&quot;&quot;&quot;&amp;[.$S365]&amp;&quot;&quot;&quot;&quot;);[$JSON.$E$1];[.$U365];[$JSON.$F$1];IF(ISNA([.$V365]);&quot;null&quot;;&quot;&quot;&quot;&quot;&amp;[.$V365]&amp;&quot;&quot;&quot;&quot;);[$JSON.$G$1];[.$X365];[$JSON.$H$1];[.$H365];[$JSON.$I$1];[.J365];[$JSON.$J$1];[.$L365];[$JSON.$K$1];[.$O365];[$JSON.$L$1];[.$N365];[$JSON.$M$1];[.$R365];[$JSON.$N$1];[.$T365];[$JSON.$O$1];[.$W365];[$JSON.$P$1];[.$A365];[$JSON.$Q$1];[.$B365];[$JSON.$R$1])" office:value-type="string" office:string-value="{&quot;id&quot;:&quot;4-56&quot;,&quot;name&quot;:&quot;サーベイング&quot;,&quot;kana&quot;:&quot;さーべいんぐ&quot;,&quot;traitText&quot;:null,&quot;ruleText&quot;:&quot;自分の手札のハイケイを1つ以上指定して発動できる。それらのハイケイすべてを墓地に置いて、墓地に置いたハイケイのレベルの合計5につき1ドローする。&quot;,&quot;legacyText&quot;:&quot;魔力化&quot;,&quot;imageUrl&quot;:&quot;https://one-draw.jp/ijinden/cardlist/004/card/04_056.png&quot;,&quot;expansion&quot;:45,&quot;rarity&quot;:1,&quot;type&quot;:3,&quot;level&quot;:3,&quot;color&quot;:4,&quot;term&quot;:0,&quot;trait&quot;:0,&quot;legacy&quot;:1,&quot;orderTable&quot;:365,&quot;orderDeck&quot;:310}," calcext:value-type="string">
            <text:p>{"id":"4-56","name":"サーベイング","kana":"さーべいんぐ","traitText":null,"ruleText":"自分の手札のハイケイを1つ以上指定して発動できる。それらのハイケイすべてを墓地に置いて、墓地に置いたハイケイのレベルの合計5につき1ドローする。","legacyText":"魔力化","imageUrl":"https://one-draw.jp/ijinden/cardlist/004/card/04_056.png","expansion":45,"rarity":1,"type":3,"level":3,"color":4,"term":0,"trait":0,"legacy":1,"orderTable":365,"orderDeck":310},</text:p>
          </table:table-cell>
          <table:table-cell table:number-columns-repeated="16347"/>
        </table:table-row>
        <table:table-row table:style-name="ro2">
          <table:table-cell office:value-type="float" office:value="366" calcext:value-type="float">
            <text:p>366</text:p>
          </table:table-cell>
          <table:table-cell office:value-type="float" office:value="311" calcext:value-type="float">
            <text:p>311</text:p>
          </table:table-cell>
          <table:table-cell office:value-type="string" calcext:value-type="string">
            <text:p>4-57</text:p>
          </table:table-cell>
          <table:table-cell office:value-type="float" office:value="57" calcext:value-type="float">
            <text:p>57</text:p>
          </table:table-cell>
          <table:table-cell office:value-type="string" calcext:value-type="string">
            <text:p>ソレイユ</text:p>
          </table:table-cell>
          <table:table-cell office:value-type="string" calcext:value-type="string">
            <text:p>それいゆ</text:p>
          </table:table-cell>
          <table:table-cell office:value-type="string" calcext:value-type="string">
            <text:p>第４弾ブースターパック</text:p>
          </table:table-cell>
          <table:table-cell table:formula="of:=VLOOKUP([.G366];[$収録番号.$A$1:$収録番号.$B$9];2;0)" office:value-type="float" office:value="45" calcext:value-type="float">
            <text:p>45</text:p>
          </table:table-cell>
          <table:table-cell office:value-type="string" calcext:value-type="string">
            <text:p>N</text:p>
          </table:table-cell>
          <table:table-cell table:formula="of:=VLOOKUP([.I366];[$レアリティ番号.$A$1:$レアリティ番号.$B$4];2;0)" office:value-type="float" office:value="1" calcext:value-type="float">
            <text:p>1</text:p>
          </table:table-cell>
          <table:table-cell office:value-type="string" calcext:value-type="string">
            <text:p>マホウ</text:p>
          </table:table-cell>
          <table:table-cell table:formula="of:=VLOOKUP([.K366];[$種類番号.$A$1:$種類番号.$B$4];2;0)" office:value-type="float" office:value="3" calcext:value-type="float">
            <text:p>3</text:p>
          </table:table-cell>
          <table:table-cell office:value-type="string" calcext:value-type="string">
            <text:p>黄</text:p>
          </table:table-cell>
          <table:table-cell table:formula="of:=VLOOKUP([.M366];[$色番号.$A$1:$色番号.$B$10];2;0)" office:value-type="float" office:value="8" calcext:value-type="float">
            <text:p>8</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赤魔導</text:p>
          </table:table-cell>
          <table:table-cell table:formula="of:=IFERROR(VLOOKUP([.$Q366];[$能力語番号.$A$1:$能力語番号.$B$10];2;0);0)" office:value-type="float" office:value="48" calcext:value-type="float">
            <text:p>48</text:p>
          </table:table-cell>
          <table:table-cell table:formula="of:=NA()" office:value-type="string" office:string-value="" calcext:value-type="error">
            <text:p>#N/A</text:p>
          </table:table-cell>
          <table:table-cell table:formula="of:=IFERROR(VLOOKUP([.$S366];[$特性番号.$A$1:$特性番号.$B$8];2;0);0)" office:value-type="float" office:value="0" calcext:value-type="float">
            <text:p>0</text:p>
          </table:table-cell>
          <table:table-cell office:value-type="string" calcext:value-type="string">
            <text:p>自分の墓地のイジンすべてを山札に戻してシャッフルする。自分の山札の上から1枚をめくって、そのカードがイジンなら手札に加える。¶赤魔導 - 赤のカードが自分の戦場か自分の魔力ゾーンにあるなら、相手の墓地のマリョクでないカード3つまでを山札の下に戻す。</text:p>
          </table:table-cell>
          <table:table-cell table:style-name="ce8" office:value-type="string" calcext:value-type="string">
            <text:p>冥府発動</text:p>
          </table:table-cell>
          <table:table-cell table:formula="of:=IFERROR(VLOOKUP([.$V366];[$遺業能力番号.$A$1:$遺業能力番号.$B$9];2;0);0)" office:value-type="float" office:value="2" calcext:value-type="float">
            <text:p>2</text:p>
          </table:table-cell>
          <table:table-cell office:value-type="string" calcext:value-type="string">
            <text:p>https://one-draw.jp/ijinden/cardlist/004/card/04_057.png</text:p>
          </table:table-cell>
          <table:table-cell table:formula="of:=CONCATENATE([$JSON.$A$1];[.$C366];[$JSON.$B$1];[.$E366];[$JSON.$C$1];[.$F366];[$JSON.$D$1];IF(ISNA([.$S366]);&quot;null&quot;;&quot;&quot;&quot;&quot;&amp;[.$S366]&amp;&quot;&quot;&quot;&quot;);[$JSON.$E$1];[.$U366];[$JSON.$F$1];IF(ISNA([.$V366]);&quot;null&quot;;&quot;&quot;&quot;&quot;&amp;[.$V366]&amp;&quot;&quot;&quot;&quot;);[$JSON.$G$1];[.$X366];[$JSON.$H$1];[.$H366];[$JSON.$I$1];[.J366];[$JSON.$J$1];[.$L366];[$JSON.$K$1];[.$O366];[$JSON.$L$1];[.$N366];[$JSON.$M$1];[.$R366];[$JSON.$N$1];[.$T366];[$JSON.$O$1];[.$W366];[$JSON.$P$1];[.$A366];[$JSON.$Q$1];[.$B366];[$JSON.$R$1])" office:value-type="string" office:string-value="{&quot;id&quot;:&quot;4-57&quot;,&quot;name&quot;:&quot;ソレイユ&quot;,&quot;kana&quot;:&quot;それいゆ&quot;,&quot;traitText&quot;:null,&quot;ruleText&quot;:&quot;自分の墓地のイジンすべてを山札に戻してシャッフルする。自分の山札の上から1枚をめくって、そのカードがイジンなら手札に加える。¶赤魔導 - 赤のカードが自分の戦場か自分の魔力ゾーンにあるなら、相手の墓地のマリョクでないカード3つまでを山札の下に戻す。&quot;,&quot;legacyText&quot;:&quot;冥府発動&quot;,&quot;imageUrl&quot;:&quot;https://one-draw.jp/ijinden/cardlist/004/card/04_057.png&quot;,&quot;expansion&quot;:45,&quot;rarity&quot;:1,&quot;type&quot;:3,&quot;level&quot;:3,&quot;color&quot;:8,&quot;term&quot;:48,&quot;trait&quot;:0,&quot;legacy&quot;:2,&quot;orderTable&quot;:366,&quot;orderDeck&quot;:311}," calcext:value-type="string">
            <text:p>{"id":"4-57","name":"ソレイユ","kana":"それいゆ","traitText":null,"ruleText":"自分の墓地のイジンすべてを山札に戻してシャッフルする。自分の山札の上から1枚をめくって、そのカードがイジンなら手札に加える。¶赤魔導 - 赤のカードが自分の戦場か自分の魔力ゾーンにあるなら、相手の墓地のマリョクでないカード3つまでを山札の下に戻す。","legacyText":"冥府発動","imageUrl":"https://one-draw.jp/ijinden/cardlist/004/card/04_057.png","expansion":45,"rarity":1,"type":3,"level":3,"color":8,"term":48,"trait":0,"legacy":2,"orderTable":366,"orderDeck":311},</text:p>
          </table:table-cell>
          <table:table-cell table:number-columns-repeated="16347"/>
        </table:table-row>
        <table:table-row table:style-name="ro2">
          <table:table-cell office:value-type="float" office:value="367" calcext:value-type="float">
            <text:p>367</text:p>
          </table:table-cell>
          <table:table-cell office:value-type="float" office:value="312" calcext:value-type="float">
            <text:p>312</text:p>
          </table:table-cell>
          <table:table-cell office:value-type="string" calcext:value-type="string">
            <text:p>4-58</text:p>
          </table:table-cell>
          <table:table-cell office:value-type="float" office:value="58" calcext:value-type="float">
            <text:p>58</text:p>
          </table:table-cell>
          <table:table-cell office:value-type="string" calcext:value-type="string">
            <text:p>ルーナ</text:p>
          </table:table-cell>
          <table:table-cell office:value-type="string" calcext:value-type="string">
            <text:p>るーな</text:p>
          </table:table-cell>
          <table:table-cell office:value-type="string" calcext:value-type="string">
            <text:p>第４弾ブースターパック</text:p>
          </table:table-cell>
          <table:table-cell table:formula="of:=VLOOKUP([.G367];[$収録番号.$A$1:$収録番号.$B$9];2;0)" office:value-type="float" office:value="45" calcext:value-type="float">
            <text:p>45</text:p>
          </table:table-cell>
          <table:table-cell office:value-type="string" calcext:value-type="string">
            <text:p>N</text:p>
          </table:table-cell>
          <table:table-cell table:formula="of:=VLOOKUP([.I367];[$レアリティ番号.$A$1:$レアリティ番号.$B$4];2;0)" office:value-type="float" office:value="1" calcext:value-type="float">
            <text:p>1</text:p>
          </table:table-cell>
          <table:table-cell office:value-type="string" calcext:value-type="string">
            <text:p>マホウ</text:p>
          </table:table-cell>
          <table:table-cell table:formula="of:=VLOOKUP([.K367];[$種類番号.$A$1:$種類番号.$B$4];2;0)" office:value-type="float" office:value="3" calcext:value-type="float">
            <text:p>3</text:p>
          </table:table-cell>
          <table:table-cell office:value-type="string" calcext:value-type="string">
            <text:p>黄</text:p>
          </table:table-cell>
          <table:table-cell table:formula="of:=VLOOKUP([.M367];[$色番号.$A$1:$色番号.$B$10];2;0)" office:value-type="float" office:value="8" calcext:value-type="float">
            <text:p>8</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青魔導</text:p>
          </table:table-cell>
          <table:table-cell table:formula="of:=IFERROR(VLOOKUP([.$Q367];[$能力語番号.$A$1:$能力語番号.$B$10];2;0);0)" office:value-type="float" office:value="80" calcext:value-type="float">
            <text:p>80</text:p>
          </table:table-cell>
          <table:table-cell table:formula="of:=NA()" office:value-type="string" office:string-value="" calcext:value-type="error">
            <text:p>#N/A</text:p>
          </table:table-cell>
          <table:table-cell table:formula="of:=IFERROR(VLOOKUP([.$S367];[$特性番号.$A$1:$特性番号.$B$8];2;0);0)" office:value-type="float" office:value="0" calcext:value-type="float">
            <text:p>0</text:p>
          </table:table-cell>
          <table:table-cell office:value-type="string" calcext:value-type="string">
            <text:p>相手の戦場のレベル3以下のイジン1体か、相手の戦場のハイケイ1つを指定して発動できる。そのイジンかハイケイを裏にする。¶青魔導 - 青のカードが自分の戦場か魔力ゾーンにあるなら「相手の戦場のガーディアン1体を手札に戻す」を発揮してもよい。</text:p>
          </table:table-cell>
          <table:table-cell table:style-name="ce8" office:value-type="string" calcext:value-type="string">
            <text:p>冥府発動</text:p>
          </table:table-cell>
          <table:table-cell table:formula="of:=IFERROR(VLOOKUP([.$V367];[$遺業能力番号.$A$1:$遺業能力番号.$B$9];2;0);0)" office:value-type="float" office:value="2" calcext:value-type="float">
            <text:p>2</text:p>
          </table:table-cell>
          <table:table-cell office:value-type="string" calcext:value-type="string">
            <text:p>https://one-draw.jp/ijinden/cardlist/004/card/04_058.png</text:p>
          </table:table-cell>
          <table:table-cell table:formula="of:=CONCATENATE([$JSON.$A$1];[.$C367];[$JSON.$B$1];[.$E367];[$JSON.$C$1];[.$F367];[$JSON.$D$1];IF(ISNA([.$S367]);&quot;null&quot;;&quot;&quot;&quot;&quot;&amp;[.$S367]&amp;&quot;&quot;&quot;&quot;);[$JSON.$E$1];[.$U367];[$JSON.$F$1];IF(ISNA([.$V367]);&quot;null&quot;;&quot;&quot;&quot;&quot;&amp;[.$V367]&amp;&quot;&quot;&quot;&quot;);[$JSON.$G$1];[.$X367];[$JSON.$H$1];[.$H367];[$JSON.$I$1];[.J367];[$JSON.$J$1];[.$L367];[$JSON.$K$1];[.$O367];[$JSON.$L$1];[.$N367];[$JSON.$M$1];[.$R367];[$JSON.$N$1];[.$T367];[$JSON.$O$1];[.$W367];[$JSON.$P$1];[.$A367];[$JSON.$Q$1];[.$B367];[$JSON.$R$1])" office:value-type="string" office:string-value="{&quot;id&quot;:&quot;4-58&quot;,&quot;name&quot;:&quot;ルーナ&quot;,&quot;kana&quot;:&quot;るーな&quot;,&quot;traitText&quot;:null,&quot;ruleText&quot;:&quot;相手の戦場のレベル3以下のイジン1体か、相手の戦場のハイケイ1つを指定して発動できる。そのイジンかハイケイを裏にする。¶青魔導 - 青のカードが自分の戦場か魔力ゾーンにあるなら「相手の戦場のガーディアン1体を手札に戻す」を発揮してもよい。&quot;,&quot;legacyText&quot;:&quot;冥府発動&quot;,&quot;imageUrl&quot;:&quot;https://one-draw.jp/ijinden/cardlist/004/card/04_058.png&quot;,&quot;expansion&quot;:45,&quot;rarity&quot;:1,&quot;type&quot;:3,&quot;level&quot;:3,&quot;color&quot;:8,&quot;term&quot;:80,&quot;trait&quot;:0,&quot;legacy&quot;:2,&quot;orderTable&quot;:367,&quot;orderDeck&quot;:312}," calcext:value-type="string">
            <text:p>{"id":"4-58","name":"ルーナ","kana":"るーな","traitText":null,"ruleText":"相手の戦場のレベル3以下のイジン1体か、相手の戦場のハイケイ1つを指定して発動できる。そのイジンかハイケイを裏にする。¶青魔導 - 青のカードが自分の戦場か魔力ゾーンにあるなら「相手の戦場のガーディアン1体を手札に戻す」を発揮してもよい。","legacyText":"冥府発動","imageUrl":"https://one-draw.jp/ijinden/cardlist/004/card/04_058.png","expansion":45,"rarity":1,"type":3,"level":3,"color":8,"term":80,"trait":0,"legacy":2,"orderTable":367,"orderDeck":312},</text:p>
          </table:table-cell>
          <table:table-cell table:number-columns-repeated="16347"/>
        </table:table-row>
        <table:table-row table:style-name="ro2">
          <table:table-cell office:value-type="float" office:value="368" calcext:value-type="float">
            <text:p>368</text:p>
          </table:table-cell>
          <table:table-cell office:value-type="float" office:value="331" calcext:value-type="float">
            <text:p>331</text:p>
          </table:table-cell>
          <table:table-cell office:value-type="string" calcext:value-type="string">
            <text:p>4-59</text:p>
          </table:table-cell>
          <table:table-cell office:value-type="float" office:value="59" calcext:value-type="float">
            <text:p>59</text:p>
          </table:table-cell>
          <table:table-cell office:value-type="string" calcext:value-type="string">
            <text:p>リユニオン</text:p>
          </table:table-cell>
          <table:table-cell office:value-type="string" calcext:value-type="string">
            <text:p>りゆにおん</text:p>
          </table:table-cell>
          <table:table-cell office:value-type="string" calcext:value-type="string">
            <text:p>第４弾ブースターパック</text:p>
          </table:table-cell>
          <table:table-cell table:formula="of:=VLOOKUP([.G368];[$収録番号.$A$1:$収録番号.$B$9];2;0)" office:value-type="float" office:value="45" calcext:value-type="float">
            <text:p>45</text:p>
          </table:table-cell>
          <table:table-cell office:value-type="string" calcext:value-type="string">
            <text:p>N</text:p>
          </table:table-cell>
          <table:table-cell table:formula="of:=VLOOKUP([.I368];[$レアリティ番号.$A$1:$レアリティ番号.$B$4];2;0)" office:value-type="float" office:value="1" calcext:value-type="float">
            <text:p>1</text:p>
          </table:table-cell>
          <table:table-cell office:value-type="string" calcext:value-type="string">
            <text:p>マホウ</text:p>
          </table:table-cell>
          <table:table-cell table:formula="of:=VLOOKUP([.K368];[$種類番号.$A$1:$種類番号.$B$4];2;0)" office:value-type="float" office:value="3" calcext:value-type="float">
            <text:p>3</text:p>
          </table:table-cell>
          <table:table-cell office:value-type="string" calcext:value-type="string">
            <text:p>紫</text:p>
          </table:table-cell>
          <table:table-cell table:formula="of:=VLOOKUP([.M368];[$色番号.$A$1:$色番号.$B$10];2;0)" office:value-type="float" office:value="16" calcext:value-type="float">
            <text:p>16</text:p>
          </table:table-cell>
          <table:table-cell office:value-type="float" office:value="5" calcext:value-type="float">
            <text:p>5</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36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68];[$特性番号.$A$1:$特性番号.$B$8];2;0);0)" office:value-type="float" office:value="0" calcext:value-type="float">
            <text:p>0</text:p>
          </table:table-cell>
          <table:table-cell office:value-type="string" calcext:value-type="string">
            <text:p>自分の戦場のイジン1体以上を指定して発動できる。それらのイジンすべてを手札に戻して、戻したイジン1体につきイジン召喚権+1する。</text:p>
          </table:table-cell>
          <table:table-cell table:style-name="ce8" office:value-type="string" calcext:value-type="string">
            <text:p>魔力化</text:p>
          </table:table-cell>
          <table:table-cell table:formula="of:=IFERROR(VLOOKUP([.$V368];[$遺業能力番号.$A$1:$遺業能力番号.$B$9];2;0);0)" office:value-type="float" office:value="1" calcext:value-type="float">
            <text:p>1</text:p>
          </table:table-cell>
          <table:table-cell office:value-type="string" calcext:value-type="string">
            <text:p>https://one-draw.jp/ijinden/cardlist/004/card/04_059.png</text:p>
          </table:table-cell>
          <table:table-cell table:formula="of:=CONCATENATE([$JSON.$A$1];[.$C368];[$JSON.$B$1];[.$E368];[$JSON.$C$1];[.$F368];[$JSON.$D$1];IF(ISNA([.$S368]);&quot;null&quot;;&quot;&quot;&quot;&quot;&amp;[.$S368]&amp;&quot;&quot;&quot;&quot;);[$JSON.$E$1];[.$U368];[$JSON.$F$1];IF(ISNA([.$V368]);&quot;null&quot;;&quot;&quot;&quot;&quot;&amp;[.$V368]&amp;&quot;&quot;&quot;&quot;);[$JSON.$G$1];[.$X368];[$JSON.$H$1];[.$H368];[$JSON.$I$1];[.J368];[$JSON.$J$1];[.$L368];[$JSON.$K$1];[.$O368];[$JSON.$L$1];[.$N368];[$JSON.$M$1];[.$R368];[$JSON.$N$1];[.$T368];[$JSON.$O$1];[.$W368];[$JSON.$P$1];[.$A368];[$JSON.$Q$1];[.$B368];[$JSON.$R$1])" office:value-type="string" office:string-value="{&quot;id&quot;:&quot;4-59&quot;,&quot;name&quot;:&quot;リユニオン&quot;,&quot;kana&quot;:&quot;りゆにおん&quot;,&quot;traitText&quot;:null,&quot;ruleText&quot;:&quot;自分の戦場のイジン1体以上を指定して発動できる。それらのイジンすべてを手札に戻して、戻したイジン1体につきイジン召喚権+1する。&quot;,&quot;legacyText&quot;:&quot;魔力化&quot;,&quot;imageUrl&quot;:&quot;https://one-draw.jp/ijinden/cardlist/004/card/04_059.png&quot;,&quot;expansion&quot;:45,&quot;rarity&quot;:1,&quot;type&quot;:3,&quot;level&quot;:5,&quot;color&quot;:16,&quot;term&quot;:0,&quot;trait&quot;:0,&quot;legacy&quot;:1,&quot;orderTable&quot;:368,&quot;orderDeck&quot;:331}," calcext:value-type="string">
            <text:p>{"id":"4-59","name":"リユニオン","kana":"りゆにおん","traitText":null,"ruleText":"自分の戦場のイジン1体以上を指定して発動できる。それらのイジンすべてを手札に戻して、戻したイジン1体につきイジン召喚権+1する。","legacyText":"魔力化","imageUrl":"https://one-draw.jp/ijinden/cardlist/004/card/04_059.png","expansion":45,"rarity":1,"type":3,"level":5,"color":16,"term":0,"trait":0,"legacy":1,"orderTable":368,"orderDeck":331},</text:p>
          </table:table-cell>
          <table:table-cell table:number-columns-repeated="16347"/>
        </table:table-row>
        <table:table-row table:style-name="ro2">
          <table:table-cell office:value-type="float" office:value="369" calcext:value-type="float">
            <text:p>369</text:p>
          </table:table-cell>
          <table:table-cell office:value-type="float" office:value="335" calcext:value-type="float">
            <text:p>335</text:p>
          </table:table-cell>
          <table:table-cell office:value-type="string" calcext:value-type="string">
            <text:p>4-60</text:p>
          </table:table-cell>
          <table:table-cell office:value-type="float" office:value="60" calcext:value-type="float">
            <text:p>60</text:p>
          </table:table-cell>
          <table:table-cell office:value-type="string" calcext:value-type="string">
            <text:p>ドッペルゲンガー</text:p>
          </table:table-cell>
          <table:table-cell office:value-type="string" calcext:value-type="string">
            <text:p>どっぺるげんがー</text:p>
          </table:table-cell>
          <table:table-cell office:value-type="string" calcext:value-type="string">
            <text:p>第４弾ブースターパック</text:p>
          </table:table-cell>
          <table:table-cell table:formula="of:=VLOOKUP([.G369];[$収録番号.$A$1:$収録番号.$B$9];2;0)" office:value-type="float" office:value="45" calcext:value-type="float">
            <text:p>45</text:p>
          </table:table-cell>
          <table:table-cell office:value-type="string" calcext:value-type="string">
            <text:p>N</text:p>
          </table:table-cell>
          <table:table-cell table:formula="of:=VLOOKUP([.I369];[$レアリティ番号.$A$1:$レアリティ番号.$B$4];2;0)" office:value-type="float" office:value="1" calcext:value-type="float">
            <text:p>1</text:p>
          </table:table-cell>
          <table:table-cell office:value-type="string" calcext:value-type="string">
            <text:p>マホウ</text:p>
          </table:table-cell>
          <table:table-cell table:formula="of:=VLOOKUP([.K369];[$種類番号.$A$1:$種類番号.$B$4];2;0)" office:value-type="float" office:value="3" calcext:value-type="float">
            <text:p>3</text:p>
          </table:table-cell>
          <table:table-cell office:value-type="string" calcext:value-type="string">
            <text:p>紫</text:p>
          </table:table-cell>
          <table:table-cell table:formula="of:=VLOOKUP([.M369];[$色番号.$A$1:$色番号.$B$10];2;0)" office:value-type="float" office:value="16" calcext:value-type="float">
            <text:p>16</text:p>
          </table:table-cell>
          <table:table-cell office:value-type="float" office:value="7" calcext:value-type="float">
            <text:p>7</text:p>
          </table:table-cell>
          <table:table-cell office:value-type="float" office:value="2" calcext:value-type="float">
            <text:p>2</text:p>
          </table:table-cell>
          <table:table-cell table:formula="of:=NA()" office:value-type="string" office:string-value="" calcext:value-type="error">
            <text:p>#N/A</text:p>
          </table:table-cell>
          <table:table-cell table:formula="of:=IFERROR(VLOOKUP([.$Q36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69];[$特性番号.$A$1:$特性番号.$B$8];2;0);0)" office:value-type="float" office:value="0" calcext:value-type="float">
            <text:p>0</text:p>
          </table:table-cell>
          <table:table-cell office:value-type="string" calcext:value-type="string">
            <text:p>相手の手札を見て、相手の手札と戦場と墓地で、同じカード名を持つ、マリョクでないカードすべてを墓地に置く。</text:p>
          </table:table-cell>
          <table:table-cell table:style-name="ce8" office:value-type="string" calcext:value-type="string">
            <text:p>手札に戻す</text:p>
          </table:table-cell>
          <table:table-cell table:formula="of:=IFERROR(VLOOKUP([.$V369];[$遺業能力番号.$A$1:$遺業能力番号.$B$9];2;0);0)" office:value-type="float" office:value="5" calcext:value-type="float">
            <text:p>5</text:p>
          </table:table-cell>
          <table:table-cell office:value-type="string" calcext:value-type="string">
            <text:p>https://one-draw.jp/ijinden/cardlist/004/card/04_060.png</text:p>
          </table:table-cell>
          <table:table-cell table:formula="of:=CONCATENATE([$JSON.$A$1];[.$C369];[$JSON.$B$1];[.$E369];[$JSON.$C$1];[.$F369];[$JSON.$D$1];IF(ISNA([.$S369]);&quot;null&quot;;&quot;&quot;&quot;&quot;&amp;[.$S369]&amp;&quot;&quot;&quot;&quot;);[$JSON.$E$1];[.$U369];[$JSON.$F$1];IF(ISNA([.$V369]);&quot;null&quot;;&quot;&quot;&quot;&quot;&amp;[.$V369]&amp;&quot;&quot;&quot;&quot;);[$JSON.$G$1];[.$X369];[$JSON.$H$1];[.$H369];[$JSON.$I$1];[.J369];[$JSON.$J$1];[.$L369];[$JSON.$K$1];[.$O369];[$JSON.$L$1];[.$N369];[$JSON.$M$1];[.$R369];[$JSON.$N$1];[.$T369];[$JSON.$O$1];[.$W369];[$JSON.$P$1];[.$A369];[$JSON.$Q$1];[.$B369];[$JSON.$R$1])" office:value-type="string" office:string-value="{&quot;id&quot;:&quot;4-60&quot;,&quot;name&quot;:&quot;ドッペルゲンガー&quot;,&quot;kana&quot;:&quot;どっぺるげんがー&quot;,&quot;traitText&quot;:null,&quot;ruleText&quot;:&quot;相手の手札を見て、相手の手札と戦場と墓地で、同じカード名を持つ、マリョクでないカードすべてを墓地に置く。&quot;,&quot;legacyText&quot;:&quot;手札に戻す&quot;,&quot;imageUrl&quot;:&quot;https://one-draw.jp/ijinden/cardlist/004/card/04_060.png&quot;,&quot;expansion&quot;:45,&quot;rarity&quot;:1,&quot;type&quot;:3,&quot;level&quot;:7,&quot;color&quot;:16,&quot;term&quot;:0,&quot;trait&quot;:0,&quot;legacy&quot;:5,&quot;orderTable&quot;:369,&quot;orderDeck&quot;:335}," calcext:value-type="string">
            <text:p>{"id":"4-60","name":"ドッペルゲンガー","kana":"どっぺるげんがー","traitText":null,"ruleText":"相手の手札を見て、相手の手札と戦場と墓地で、同じカード名を持つ、マリョクでないカードすべてを墓地に置く。","legacyText":"手札に戻す","imageUrl":"https://one-draw.jp/ijinden/cardlist/004/card/04_060.png","expansion":45,"rarity":1,"type":3,"level":7,"color":16,"term":0,"trait":0,"legacy":5,"orderTable":369,"orderDeck":335},</text:p>
          </table:table-cell>
          <table:table-cell table:number-columns-repeated="16347"/>
        </table:table-row>
        <table:table-row table:style-name="ro2">
          <table:table-cell office:value-type="float" office:value="370" calcext:value-type="float">
            <text:p>370</text:p>
          </table:table-cell>
          <table:table-cell office:value-type="float" office:value="287" calcext:value-type="float">
            <text:p>287</text:p>
          </table:table-cell>
          <table:table-cell office:value-type="string" calcext:value-type="string">
            <text:p>4-61</text:p>
          </table:table-cell>
          <table:table-cell office:value-type="float" office:value="61" calcext:value-type="float">
            <text:p>61</text:p>
          </table:table-cell>
          <table:table-cell office:value-type="string" calcext:value-type="string">
            <text:p>ソリッドビジョンα</text:p>
          </table:table-cell>
          <table:table-cell office:value-type="string" calcext:value-type="string">
            <text:p>そりっどびじょんあるふぁ</text:p>
          </table:table-cell>
          <table:table-cell office:value-type="string" calcext:value-type="string">
            <text:p>第４弾ブースターパック</text:p>
          </table:table-cell>
          <table:table-cell table:formula="of:=VLOOKUP([.G370];[$収録番号.$A$1:$収録番号.$B$9];2;0)" office:value-type="float" office:value="45" calcext:value-type="float">
            <text:p>45</text:p>
          </table:table-cell>
          <table:table-cell office:value-type="string" calcext:value-type="string">
            <text:p>N</text:p>
          </table:table-cell>
          <table:table-cell table:formula="of:=VLOOKUP([.I370];[$レアリティ番号.$A$1:$レアリティ番号.$B$4];2;0)" office:value-type="float" office:value="1" calcext:value-type="float">
            <text:p>1</text:p>
          </table:table-cell>
          <table:table-cell office:value-type="string" calcext:value-type="string">
            <text:p>マホウ</text:p>
          </table:table-cell>
          <table:table-cell table:formula="of:=VLOOKUP([.K370];[$種類番号.$A$1:$種類番号.$B$4];2;0)" office:value-type="float" office:value="3" calcext:value-type="float">
            <text:p>3</text:p>
          </table:table-cell>
          <table:table-cell office:value-type="string" calcext:value-type="string">
            <text:p>無色</text:p>
          </table:table-cell>
          <table:table-cell table:formula="of:=VLOOKUP([.M370];[$色番号.$A$1:$色番号.$B$10];2;0)" office:value-type="float" office:value="64" calcext:value-type="float">
            <text:p>64</text:p>
          </table:table-cell>
          <table:table-cell table:number-columns-repeated="2" office:value-type="float" office:value="1" calcext:value-type="float">
            <text:p>1</text:p>
          </table:table-cell>
          <table:table-cell office:value-type="string" calcext:value-type="string">
            <text:p>赤魔導</text:p>
          </table:table-cell>
          <table:table-cell table:formula="of:=IFERROR(VLOOKUP([.$Q370];[$能力語番号.$A$1:$能力語番号.$B$10];2;0);0)" office:value-type="float" office:value="48" calcext:value-type="float">
            <text:p>48</text:p>
          </table:table-cell>
          <table:table-cell table:formula="of:=NA()" office:value-type="string" office:string-value="" calcext:value-type="error">
            <text:p>#N/A</text:p>
          </table:table-cell>
          <table:table-cell table:formula="of:=IFERROR(VLOOKUP([.$S370];[$特性番号.$A$1:$特性番号.$B$8];2;0);0)" office:value-type="float" office:value="0" calcext:value-type="float">
            <text:p>0</text:p>
          </table:table-cell>
          <table:table-cell office:value-type="string" calcext:value-type="string">
            <text:p>1ドローする。¶赤魔導 - 赤のカードが自分の戦場か自分の魔力ゾーンにあるなら「戦場のハイケイ1つを破壊する」を発揮してもよい。</text:p>
          </table:table-cell>
          <table:table-cell table:style-name="ce8" office:value-type="string" calcext:value-type="string">
            <text:p>冥府発動</text:p>
          </table:table-cell>
          <table:table-cell table:formula="of:=IFERROR(VLOOKUP([.$V370];[$遺業能力番号.$A$1:$遺業能力番号.$B$9];2;0);0)" office:value-type="float" office:value="2" calcext:value-type="float">
            <text:p>2</text:p>
          </table:table-cell>
          <table:table-cell office:value-type="string" calcext:value-type="string">
            <text:p>https://one-draw.jp/ijinden/cardlist/004/card/04_061.png</text:p>
          </table:table-cell>
          <table:table-cell table:formula="of:=CONCATENATE([$JSON.$A$1];[.$C370];[$JSON.$B$1];[.$E370];[$JSON.$C$1];[.$F370];[$JSON.$D$1];IF(ISNA([.$S370]);&quot;null&quot;;&quot;&quot;&quot;&quot;&amp;[.$S370]&amp;&quot;&quot;&quot;&quot;);[$JSON.$E$1];[.$U370];[$JSON.$F$1];IF(ISNA([.$V370]);&quot;null&quot;;&quot;&quot;&quot;&quot;&amp;[.$V370]&amp;&quot;&quot;&quot;&quot;);[$JSON.$G$1];[.$X370];[$JSON.$H$1];[.$H370];[$JSON.$I$1];[.J370];[$JSON.$J$1];[.$L370];[$JSON.$K$1];[.$O370];[$JSON.$L$1];[.$N370];[$JSON.$M$1];[.$R370];[$JSON.$N$1];[.$T370];[$JSON.$O$1];[.$W370];[$JSON.$P$1];[.$A370];[$JSON.$Q$1];[.$B370];[$JSON.$R$1])" office:value-type="string" office:string-value="{&quot;id&quot;:&quot;4-61&quot;,&quot;name&quot;:&quot;ソリッドビジョンα&quot;,&quot;kana&quot;:&quot;そりっどびじょんあるふぁ&quot;,&quot;traitText&quot;:null,&quot;ruleText&quot;:&quot;1ドローする。¶赤魔導 - 赤のカードが自分の戦場か自分の魔力ゾーンにあるなら「戦場のハイケイ1つを破壊する」を発揮してもよい。&quot;,&quot;legacyText&quot;:&quot;冥府発動&quot;,&quot;imageUrl&quot;:&quot;https://one-draw.jp/ijinden/cardlist/004/card/04_061.png&quot;,&quot;expansion&quot;:45,&quot;rarity&quot;:1,&quot;type&quot;:3,&quot;level&quot;:1,&quot;color&quot;:64,&quot;term&quot;:48,&quot;trait&quot;:0,&quot;legacy&quot;:2,&quot;orderTable&quot;:370,&quot;orderDeck&quot;:287}," calcext:value-type="string">
            <text:p>{"id":"4-61","name":"ソリッドビジョンα","kana":"そりっどびじょんあるふぁ","traitText":null,"ruleText":"1ドローする。¶赤魔導 - 赤のカードが自分の戦場か自分の魔力ゾーンにあるなら「戦場のハイケイ1つを破壊する」を発揮してもよい。","legacyText":"冥府発動","imageUrl":"https://one-draw.jp/ijinden/cardlist/004/card/04_061.png","expansion":45,"rarity":1,"type":3,"level":1,"color":64,"term":48,"trait":0,"legacy":2,"orderTable":370,"orderDeck":287},</text:p>
          </table:table-cell>
          <table:table-cell table:number-columns-repeated="16347"/>
        </table:table-row>
        <table:table-row table:style-name="ro2">
          <table:table-cell office:value-type="float" office:value="371" calcext:value-type="float">
            <text:p>371</text:p>
          </table:table-cell>
          <table:table-cell office:value-type="float" office:value="288" calcext:value-type="float">
            <text:p>288</text:p>
          </table:table-cell>
          <table:table-cell office:value-type="string" calcext:value-type="string">
            <text:p>4-62</text:p>
          </table:table-cell>
          <table:table-cell office:value-type="float" office:value="62" calcext:value-type="float">
            <text:p>62</text:p>
          </table:table-cell>
          <table:table-cell office:value-type="string" calcext:value-type="string">
            <text:p>ソリッドビジョンδ</text:p>
          </table:table-cell>
          <table:table-cell office:value-type="string" calcext:value-type="string">
            <text:p>そりっどびじょんでるた</text:p>
          </table:table-cell>
          <table:table-cell office:value-type="string" calcext:value-type="string">
            <text:p>第４弾ブースターパック</text:p>
          </table:table-cell>
          <table:table-cell table:formula="of:=VLOOKUP([.G371];[$収録番号.$A$1:$収録番号.$B$9];2;0)" office:value-type="float" office:value="45" calcext:value-type="float">
            <text:p>45</text:p>
          </table:table-cell>
          <table:table-cell office:value-type="string" calcext:value-type="string">
            <text:p>N</text:p>
          </table:table-cell>
          <table:table-cell table:formula="of:=VLOOKUP([.I371];[$レアリティ番号.$A$1:$レアリティ番号.$B$4];2;0)" office:value-type="float" office:value="1" calcext:value-type="float">
            <text:p>1</text:p>
          </table:table-cell>
          <table:table-cell office:value-type="string" calcext:value-type="string">
            <text:p>マホウ</text:p>
          </table:table-cell>
          <table:table-cell table:formula="of:=VLOOKUP([.K371];[$種類番号.$A$1:$種類番号.$B$4];2;0)" office:value-type="float" office:value="3" calcext:value-type="float">
            <text:p>3</text:p>
          </table:table-cell>
          <table:table-cell office:value-type="string" calcext:value-type="string">
            <text:p>無色</text:p>
          </table:table-cell>
          <table:table-cell table:formula="of:=VLOOKUP([.M371];[$色番号.$A$1:$色番号.$B$10];2;0)" office:value-type="float" office:value="64" calcext:value-type="float">
            <text:p>64</text:p>
          </table:table-cell>
          <table:table-cell table:number-columns-repeated="2" office:value-type="float" office:value="1" calcext:value-type="float">
            <text:p>1</text:p>
          </table:table-cell>
          <table:table-cell office:value-type="string" calcext:value-type="string">
            <text:p>青魔導</text:p>
          </table:table-cell>
          <table:table-cell table:formula="of:=IFERROR(VLOOKUP([.$Q371];[$能力語番号.$A$1:$能力語番号.$B$10];2;0);0)" office:value-type="float" office:value="80" calcext:value-type="float">
            <text:p>80</text:p>
          </table:table-cell>
          <table:table-cell table:formula="of:=NA()" office:value-type="string" office:string-value="" calcext:value-type="error">
            <text:p>#N/A</text:p>
          </table:table-cell>
          <table:table-cell table:formula="of:=IFERROR(VLOOKUP([.$S371];[$特性番号.$A$1:$特性番号.$B$8];2;0);0)" office:value-type="float" office:value="0" calcext:value-type="float">
            <text:p>0</text:p>
          </table:table-cell>
          <table:table-cell office:value-type="string" calcext:value-type="string">
            <text:p>1ドローする。¶青魔導 - 青のカードが自分の戦場か自分の魔力ゾーンにあるなら「1ドローして、自分の手札の他のカード2つを墓地に置く」を発揮してもよい。</text:p>
          </table:table-cell>
          <table:table-cell table:style-name="ce8" office:value-type="string" calcext:value-type="string">
            <text:p>冥府発動</text:p>
          </table:table-cell>
          <table:table-cell table:formula="of:=IFERROR(VLOOKUP([.$V371];[$遺業能力番号.$A$1:$遺業能力番号.$B$9];2;0);0)" office:value-type="float" office:value="2" calcext:value-type="float">
            <text:p>2</text:p>
          </table:table-cell>
          <table:table-cell office:value-type="string" calcext:value-type="string">
            <text:p>https://one-draw.jp/ijinden/cardlist/004/card/04_062.png</text:p>
          </table:table-cell>
          <table:table-cell table:formula="of:=CONCATENATE([$JSON.$A$1];[.$C371];[$JSON.$B$1];[.$E371];[$JSON.$C$1];[.$F371];[$JSON.$D$1];IF(ISNA([.$S371]);&quot;null&quot;;&quot;&quot;&quot;&quot;&amp;[.$S371]&amp;&quot;&quot;&quot;&quot;);[$JSON.$E$1];[.$U371];[$JSON.$F$1];IF(ISNA([.$V371]);&quot;null&quot;;&quot;&quot;&quot;&quot;&amp;[.$V371]&amp;&quot;&quot;&quot;&quot;);[$JSON.$G$1];[.$X371];[$JSON.$H$1];[.$H371];[$JSON.$I$1];[.J371];[$JSON.$J$1];[.$L371];[$JSON.$K$1];[.$O371];[$JSON.$L$1];[.$N371];[$JSON.$M$1];[.$R371];[$JSON.$N$1];[.$T371];[$JSON.$O$1];[.$W371];[$JSON.$P$1];[.$A371];[$JSON.$Q$1];[.$B371];[$JSON.$R$1])" office:value-type="string" office:string-value="{&quot;id&quot;:&quot;4-62&quot;,&quot;name&quot;:&quot;ソリッドビジョンδ&quot;,&quot;kana&quot;:&quot;そりっどびじょんでるた&quot;,&quot;traitText&quot;:null,&quot;ruleText&quot;:&quot;1ドローする。¶青魔導 - 青のカードが自分の戦場か自分の魔力ゾーンにあるなら「1ドローして、自分の手札の他のカード2つを墓地に置く」を発揮してもよい。&quot;,&quot;legacyText&quot;:&quot;冥府発動&quot;,&quot;imageUrl&quot;:&quot;https://one-draw.jp/ijinden/cardlist/004/card/04_062.png&quot;,&quot;expansion&quot;:45,&quot;rarity&quot;:1,&quot;type&quot;:3,&quot;level&quot;:1,&quot;color&quot;:64,&quot;term&quot;:80,&quot;trait&quot;:0,&quot;legacy&quot;:2,&quot;orderTable&quot;:371,&quot;orderDeck&quot;:288}," calcext:value-type="string">
            <text:p>{"id":"4-62","name":"ソリッドビジョンδ","kana":"そりっどびじょんでるた","traitText":null,"ruleText":"1ドローする。¶青魔導 - 青のカードが自分の戦場か自分の魔力ゾーンにあるなら「1ドローして、自分の手札の他のカード2つを墓地に置く」を発揮してもよい。","legacyText":"冥府発動","imageUrl":"https://one-draw.jp/ijinden/cardlist/004/card/04_062.png","expansion":45,"rarity":1,"type":3,"level":1,"color":64,"term":80,"trait":0,"legacy":2,"orderTable":371,"orderDeck":288},</text:p>
          </table:table-cell>
          <table:table-cell table:number-columns-repeated="16347"/>
        </table:table-row>
        <table:table-row table:style-name="ro2">
          <table:table-cell office:value-type="float" office:value="372" calcext:value-type="float">
            <text:p>372</text:p>
          </table:table-cell>
          <table:table-cell office:value-type="float" office:value="289" calcext:value-type="float">
            <text:p>289</text:p>
          </table:table-cell>
          <table:table-cell office:value-type="string" calcext:value-type="string">
            <text:p>4-63</text:p>
          </table:table-cell>
          <table:table-cell office:value-type="float" office:value="63" calcext:value-type="float">
            <text:p>63</text:p>
          </table:table-cell>
          <table:table-cell office:value-type="string" calcext:value-type="string">
            <text:p>ソリッドビジョンΩ</text:p>
          </table:table-cell>
          <table:table-cell office:value-type="string" calcext:value-type="string">
            <text:p>そりっどびじょんおめが</text:p>
          </table:table-cell>
          <table:table-cell office:value-type="string" calcext:value-type="string">
            <text:p>第４弾ブースターパック</text:p>
          </table:table-cell>
          <table:table-cell table:formula="of:=VLOOKUP([.G372];[$収録番号.$A$1:$収録番号.$B$9];2;0)" office:value-type="float" office:value="45" calcext:value-type="float">
            <text:p>45</text:p>
          </table:table-cell>
          <table:table-cell office:value-type="string" calcext:value-type="string">
            <text:p>N</text:p>
          </table:table-cell>
          <table:table-cell table:formula="of:=VLOOKUP([.I372];[$レアリティ番号.$A$1:$レアリティ番号.$B$4];2;0)" office:value-type="float" office:value="1" calcext:value-type="float">
            <text:p>1</text:p>
          </table:table-cell>
          <table:table-cell office:value-type="string" calcext:value-type="string">
            <text:p>マホウ</text:p>
          </table:table-cell>
          <table:table-cell table:formula="of:=VLOOKUP([.K372];[$種類番号.$A$1:$種類番号.$B$4];2;0)" office:value-type="float" office:value="3" calcext:value-type="float">
            <text:p>3</text:p>
          </table:table-cell>
          <table:table-cell office:value-type="string" calcext:value-type="string">
            <text:p>無色</text:p>
          </table:table-cell>
          <table:table-cell table:formula="of:=VLOOKUP([.M372];[$色番号.$A$1:$色番号.$B$10];2;0)" office:value-type="float" office:value="64" calcext:value-type="float">
            <text:p>64</text:p>
          </table:table-cell>
          <table:table-cell table:number-columns-repeated="2" office:value-type="float" office:value="1" calcext:value-type="float">
            <text:p>1</text:p>
          </table:table-cell>
          <table:table-cell office:value-type="string" calcext:value-type="string">
            <text:p>緑魔導</text:p>
          </table:table-cell>
          <table:table-cell table:formula="of:=IFERROR(VLOOKUP([.$Q372];[$能力語番号.$A$1:$能力語番号.$B$10];2;0);0)" office:value-type="float" office:value="144" calcext:value-type="float">
            <text:p>144</text:p>
          </table:table-cell>
          <table:table-cell table:formula="of:=NA()" office:value-type="string" office:string-value="" calcext:value-type="error">
            <text:p>#N/A</text:p>
          </table:table-cell>
          <table:table-cell table:formula="of:=IFERROR(VLOOKUP([.$S372];[$特性番号.$A$1:$特性番号.$B$8];2;0);0)" office:value-type="float" office:value="0" calcext:value-type="float">
            <text:p>0</text:p>
          </table:table-cell>
          <table:table-cell office:value-type="string" calcext:value-type="string">
            <text:p>1ドローする。¶緑魔導 - 緑のカードが自分の戦場か自分の魔力ゾーンにあるなら「これを裏にして魔力ゾーンに置く」を発揮してもよい。</text:p>
          </table:table-cell>
          <table:table-cell table:style-name="ce8" office:value-type="string" calcext:value-type="string">
            <text:p>冥府発動</text:p>
          </table:table-cell>
          <table:table-cell table:formula="of:=IFERROR(VLOOKUP([.$V372];[$遺業能力番号.$A$1:$遺業能力番号.$B$9];2;0);0)" office:value-type="float" office:value="2" calcext:value-type="float">
            <text:p>2</text:p>
          </table:table-cell>
          <table:table-cell office:value-type="string" calcext:value-type="string">
            <text:p>https://one-draw.jp/ijinden/cardlist/004/card/04_063.png</text:p>
          </table:table-cell>
          <table:table-cell table:formula="of:=CONCATENATE([$JSON.$A$1];[.$C372];[$JSON.$B$1];[.$E372];[$JSON.$C$1];[.$F372];[$JSON.$D$1];IF(ISNA([.$S372]);&quot;null&quot;;&quot;&quot;&quot;&quot;&amp;[.$S372]&amp;&quot;&quot;&quot;&quot;);[$JSON.$E$1];[.$U372];[$JSON.$F$1];IF(ISNA([.$V372]);&quot;null&quot;;&quot;&quot;&quot;&quot;&amp;[.$V372]&amp;&quot;&quot;&quot;&quot;);[$JSON.$G$1];[.$X372];[$JSON.$H$1];[.$H372];[$JSON.$I$1];[.J372];[$JSON.$J$1];[.$L372];[$JSON.$K$1];[.$O372];[$JSON.$L$1];[.$N372];[$JSON.$M$1];[.$R372];[$JSON.$N$1];[.$T372];[$JSON.$O$1];[.$W372];[$JSON.$P$1];[.$A372];[$JSON.$Q$1];[.$B372];[$JSON.$R$1])" office:value-type="string" office:string-value="{&quot;id&quot;:&quot;4-63&quot;,&quot;name&quot;:&quot;ソリッドビジョンΩ&quot;,&quot;kana&quot;:&quot;そりっどびじょんおめが&quot;,&quot;traitText&quot;:null,&quot;ruleText&quot;:&quot;1ドローする。¶緑魔導 - 緑のカードが自分の戦場か自分の魔力ゾーンにあるなら「これを裏にして魔力ゾーンに置く」を発揮してもよい。&quot;,&quot;legacyText&quot;:&quot;冥府発動&quot;,&quot;imageUrl&quot;:&quot;https://one-draw.jp/ijinden/cardlist/004/card/04_063.png&quot;,&quot;expansion&quot;:45,&quot;rarity&quot;:1,&quot;type&quot;:3,&quot;level&quot;:1,&quot;color&quot;:64,&quot;term&quot;:144,&quot;trait&quot;:0,&quot;legacy&quot;:2,&quot;orderTable&quot;:372,&quot;orderDeck&quot;:289}," calcext:value-type="string">
            <text:p>{"id":"4-63","name":"ソリッドビジョンΩ","kana":"そりっどびじょんおめが","traitText":null,"ruleText":"1ドローする。¶緑魔導 - 緑のカードが自分の戦場か自分の魔力ゾーンにあるなら「これを裏にして魔力ゾーンに置く」を発揮してもよい。","legacyText":"冥府発動","imageUrl":"https://one-draw.jp/ijinden/cardlist/004/card/04_063.png","expansion":45,"rarity":1,"type":3,"level":1,"color":64,"term":144,"trait":0,"legacy":2,"orderTable":372,"orderDeck":289},</text:p>
          </table:table-cell>
          <table:table-cell table:number-columns-repeated="16347"/>
        </table:table-row>
        <table:table-row table:style-name="ro2">
          <table:table-cell office:value-type="float" office:value="373" calcext:value-type="float">
            <text:p>373</text:p>
          </table:table-cell>
          <table:table-cell office:value-type="float" office:value="290" calcext:value-type="float">
            <text:p>290</text:p>
          </table:table-cell>
          <table:table-cell office:value-type="string" calcext:value-type="string">
            <text:p>4-64</text:p>
          </table:table-cell>
          <table:table-cell office:value-type="float" office:value="64" calcext:value-type="float">
            <text:p>64</text:p>
          </table:table-cell>
          <table:table-cell office:value-type="string" calcext:value-type="string">
            <text:p>ソリッドビジョンβ</text:p>
          </table:table-cell>
          <table:table-cell office:value-type="string" calcext:value-type="string">
            <text:p>そりっどびじょんべーた</text:p>
          </table:table-cell>
          <table:table-cell office:value-type="string" calcext:value-type="string">
            <text:p>第４弾ブースターパック</text:p>
          </table:table-cell>
          <table:table-cell table:formula="of:=VLOOKUP([.G373];[$収録番号.$A$1:$収録番号.$B$9];2;0)" office:value-type="float" office:value="45" calcext:value-type="float">
            <text:p>45</text:p>
          </table:table-cell>
          <table:table-cell office:value-type="string" calcext:value-type="string">
            <text:p>N</text:p>
          </table:table-cell>
          <table:table-cell table:formula="of:=VLOOKUP([.I373];[$レアリティ番号.$A$1:$レアリティ番号.$B$4];2;0)" office:value-type="float" office:value="1" calcext:value-type="float">
            <text:p>1</text:p>
          </table:table-cell>
          <table:table-cell office:value-type="string" calcext:value-type="string">
            <text:p>マホウ</text:p>
          </table:table-cell>
          <table:table-cell table:formula="of:=VLOOKUP([.K373];[$種類番号.$A$1:$種類番号.$B$4];2;0)" office:value-type="float" office:value="3" calcext:value-type="float">
            <text:p>3</text:p>
          </table:table-cell>
          <table:table-cell office:value-type="string" calcext:value-type="string">
            <text:p>無色</text:p>
          </table:table-cell>
          <table:table-cell table:formula="of:=VLOOKUP([.M373];[$色番号.$A$1:$色番号.$B$10];2;0)" office:value-type="float" office:value="64" calcext:value-type="float">
            <text:p>64</text:p>
          </table:table-cell>
          <table:table-cell table:number-columns-repeated="2" office:value-type="float" office:value="1" calcext:value-type="float">
            <text:p>1</text:p>
          </table:table-cell>
          <table:table-cell office:value-type="string" calcext:value-type="string">
            <text:p>黄魔導</text:p>
          </table:table-cell>
          <table:table-cell table:formula="of:=IFERROR(VLOOKUP([.$Q373];[$能力語番号.$A$1:$能力語番号.$B$10];2;0);0)" office:value-type="float" office:value="272" calcext:value-type="float">
            <text:p>272</text:p>
          </table:table-cell>
          <table:table-cell table:formula="of:=NA()" office:value-type="string" office:string-value="" calcext:value-type="error">
            <text:p>#N/A</text:p>
          </table:table-cell>
          <table:table-cell table:formula="of:=IFERROR(VLOOKUP([.$S373];[$特性番号.$A$1:$特性番号.$B$8];2;0);0)" office:value-type="float" office:value="0" calcext:value-type="float">
            <text:p>0</text:p>
          </table:table-cell>
          <table:table-cell office:value-type="string" calcext:value-type="string">
            <text:p>1ドローする。¶黄魔導 - 黄のカードが自分の戦場か自分の魔力ゾーンにあるなら「墓地のマリョクでないカード1つを山札の上か下に戻す」を発揮してもよい。</text:p>
          </table:table-cell>
          <table:table-cell table:style-name="ce8" office:value-type="string" calcext:value-type="string">
            <text:p>冥府発動</text:p>
          </table:table-cell>
          <table:table-cell table:formula="of:=IFERROR(VLOOKUP([.$V373];[$遺業能力番号.$A$1:$遺業能力番号.$B$9];2;0);0)" office:value-type="float" office:value="2" calcext:value-type="float">
            <text:p>2</text:p>
          </table:table-cell>
          <table:table-cell office:value-type="string" calcext:value-type="string">
            <text:p>https://one-draw.jp/ijinden/cardlist/004/card/04_064.png</text:p>
          </table:table-cell>
          <table:table-cell table:formula="of:=CONCATENATE([$JSON.$A$1];[.$C373];[$JSON.$B$1];[.$E373];[$JSON.$C$1];[.$F373];[$JSON.$D$1];IF(ISNA([.$S373]);&quot;null&quot;;&quot;&quot;&quot;&quot;&amp;[.$S373]&amp;&quot;&quot;&quot;&quot;);[$JSON.$E$1];[.$U373];[$JSON.$F$1];IF(ISNA([.$V373]);&quot;null&quot;;&quot;&quot;&quot;&quot;&amp;[.$V373]&amp;&quot;&quot;&quot;&quot;);[$JSON.$G$1];[.$X373];[$JSON.$H$1];[.$H373];[$JSON.$I$1];[.J373];[$JSON.$J$1];[.$L373];[$JSON.$K$1];[.$O373];[$JSON.$L$1];[.$N373];[$JSON.$M$1];[.$R373];[$JSON.$N$1];[.$T373];[$JSON.$O$1];[.$W373];[$JSON.$P$1];[.$A373];[$JSON.$Q$1];[.$B373];[$JSON.$R$1])" office:value-type="string" office:string-value="{&quot;id&quot;:&quot;4-64&quot;,&quot;name&quot;:&quot;ソリッドビジョンβ&quot;,&quot;kana&quot;:&quot;そりっどびじょんべーた&quot;,&quot;traitText&quot;:null,&quot;ruleText&quot;:&quot;1ドローする。¶黄魔導 - 黄のカードが自分の戦場か自分の魔力ゾーンにあるなら「墓地のマリョクでないカード1つを山札の上か下に戻す」を発揮してもよい。&quot;,&quot;legacyText&quot;:&quot;冥府発動&quot;,&quot;imageUrl&quot;:&quot;https://one-draw.jp/ijinden/cardlist/004/card/04_064.png&quot;,&quot;expansion&quot;:45,&quot;rarity&quot;:1,&quot;type&quot;:3,&quot;level&quot;:1,&quot;color&quot;:64,&quot;term&quot;:272,&quot;trait&quot;:0,&quot;legacy&quot;:2,&quot;orderTable&quot;:373,&quot;orderDeck&quot;:290}," calcext:value-type="string">
            <text:p>{"id":"4-64","name":"ソリッドビジョンβ","kana":"そりっどびじょんべーた","traitText":null,"ruleText":"1ドローする。¶黄魔導 - 黄のカードが自分の戦場か自分の魔力ゾーンにあるなら「墓地のマリョクでないカード1つを山札の上か下に戻す」を発揮してもよい。","legacyText":"冥府発動","imageUrl":"https://one-draw.jp/ijinden/cardlist/004/card/04_064.png","expansion":45,"rarity":1,"type":3,"level":1,"color":64,"term":272,"trait":0,"legacy":2,"orderTable":373,"orderDeck":290},</text:p>
          </table:table-cell>
          <table:table-cell table:number-columns-repeated="16347"/>
        </table:table-row>
        <table:table-row table:style-name="ro2">
          <table:table-cell office:value-type="float" office:value="374" calcext:value-type="float">
            <text:p>374</text:p>
          </table:table-cell>
          <table:table-cell office:value-type="float" office:value="291" calcext:value-type="float">
            <text:p>291</text:p>
          </table:table-cell>
          <table:table-cell office:value-type="string" calcext:value-type="string">
            <text:p>4-65</text:p>
          </table:table-cell>
          <table:table-cell office:value-type="float" office:value="65" calcext:value-type="float">
            <text:p>65</text:p>
          </table:table-cell>
          <table:table-cell office:value-type="string" calcext:value-type="string">
            <text:p>ソリッドビジョンγ</text:p>
          </table:table-cell>
          <table:table-cell office:value-type="string" calcext:value-type="string">
            <text:p>そりっどびじょんがんま</text:p>
          </table:table-cell>
          <table:table-cell office:value-type="string" calcext:value-type="string">
            <text:p>第４弾ブースターパック</text:p>
          </table:table-cell>
          <table:table-cell table:formula="of:=VLOOKUP([.G374];[$収録番号.$A$1:$収録番号.$B$9];2;0)" office:value-type="float" office:value="45" calcext:value-type="float">
            <text:p>45</text:p>
          </table:table-cell>
          <table:table-cell office:value-type="string" calcext:value-type="string">
            <text:p>N</text:p>
          </table:table-cell>
          <table:table-cell table:formula="of:=VLOOKUP([.I374];[$レアリティ番号.$A$1:$レアリティ番号.$B$4];2;0)" office:value-type="float" office:value="1" calcext:value-type="float">
            <text:p>1</text:p>
          </table:table-cell>
          <table:table-cell office:value-type="string" calcext:value-type="string">
            <text:p>マホウ</text:p>
          </table:table-cell>
          <table:table-cell table:formula="of:=VLOOKUP([.K374];[$種類番号.$A$1:$種類番号.$B$4];2;0)" office:value-type="float" office:value="3" calcext:value-type="float">
            <text:p>3</text:p>
          </table:table-cell>
          <table:table-cell office:value-type="string" calcext:value-type="string">
            <text:p>無色</text:p>
          </table:table-cell>
          <table:table-cell table:formula="of:=VLOOKUP([.M374];[$色番号.$A$1:$色番号.$B$10];2;0)" office:value-type="float" office:value="64" calcext:value-type="float">
            <text:p>64</text:p>
          </table:table-cell>
          <table:table-cell table:number-columns-repeated="2" office:value-type="float" office:value="1" calcext:value-type="float">
            <text:p>1</text:p>
          </table:table-cell>
          <table:table-cell office:value-type="string" calcext:value-type="string">
            <text:p>紫魔導</text:p>
          </table:table-cell>
          <table:table-cell table:formula="of:=IFERROR(VLOOKUP([.$Q374];[$能力語番号.$A$1:$能力語番号.$B$10];2;0);0)" office:value-type="float" office:value="528" calcext:value-type="float">
            <text:p>528</text:p>
          </table:table-cell>
          <table:table-cell table:formula="of:=NA()" office:value-type="string" office:string-value="" calcext:value-type="error">
            <text:p>#N/A</text:p>
          </table:table-cell>
          <table:table-cell table:formula="of:=IFERROR(VLOOKUP([.$S374];[$特性番号.$A$1:$特性番号.$B$8];2;0);0)" office:value-type="float" office:value="0" calcext:value-type="float">
            <text:p>0</text:p>
          </table:table-cell>
          <table:table-cell office:value-type="string" calcext:value-type="string">
            <text:p>1ドローする。¶紫魔導 - 紫のカードが自分の戦場か自分の魔力ゾーンにあるなら「自分の戦場のガーディアン1体を手札に戻す」を発揮してもよい。</text:p>
          </table:table-cell>
          <table:table-cell table:style-name="ce8" office:value-type="string" calcext:value-type="string">
            <text:p>冥府発動</text:p>
          </table:table-cell>
          <table:table-cell table:formula="of:=IFERROR(VLOOKUP([.$V374];[$遺業能力番号.$A$1:$遺業能力番号.$B$9];2;0);0)" office:value-type="float" office:value="2" calcext:value-type="float">
            <text:p>2</text:p>
          </table:table-cell>
          <table:table-cell office:value-type="string" calcext:value-type="string">
            <text:p>https://one-draw.jp/ijinden/cardlist/004/card/04_065.png</text:p>
          </table:table-cell>
          <table:table-cell table:formula="of:=CONCATENATE([$JSON.$A$1];[.$C374];[$JSON.$B$1];[.$E374];[$JSON.$C$1];[.$F374];[$JSON.$D$1];IF(ISNA([.$S374]);&quot;null&quot;;&quot;&quot;&quot;&quot;&amp;[.$S374]&amp;&quot;&quot;&quot;&quot;);[$JSON.$E$1];[.$U374];[$JSON.$F$1];IF(ISNA([.$V374]);&quot;null&quot;;&quot;&quot;&quot;&quot;&amp;[.$V374]&amp;&quot;&quot;&quot;&quot;);[$JSON.$G$1];[.$X374];[$JSON.$H$1];[.$H374];[$JSON.$I$1];[.J374];[$JSON.$J$1];[.$L374];[$JSON.$K$1];[.$O374];[$JSON.$L$1];[.$N374];[$JSON.$M$1];[.$R374];[$JSON.$N$1];[.$T374];[$JSON.$O$1];[.$W374];[$JSON.$P$1];[.$A374];[$JSON.$Q$1];[.$B374];[$JSON.$R$1])" office:value-type="string" office:string-value="{&quot;id&quot;:&quot;4-65&quot;,&quot;name&quot;:&quot;ソリッドビジョンγ&quot;,&quot;kana&quot;:&quot;そりっどびじょんがんま&quot;,&quot;traitText&quot;:null,&quot;ruleText&quot;:&quot;1ドローする。¶紫魔導 - 紫のカードが自分の戦場か自分の魔力ゾーンにあるなら「自分の戦場のガーディアン1体を手札に戻す」を発揮してもよい。&quot;,&quot;legacyText&quot;:&quot;冥府発動&quot;,&quot;imageUrl&quot;:&quot;https://one-draw.jp/ijinden/cardlist/004/card/04_065.png&quot;,&quot;expansion&quot;:45,&quot;rarity&quot;:1,&quot;type&quot;:3,&quot;level&quot;:1,&quot;color&quot;:64,&quot;term&quot;:528,&quot;trait&quot;:0,&quot;legacy&quot;:2,&quot;orderTable&quot;:374,&quot;orderDeck&quot;:291}," calcext:value-type="string">
            <text:p>{"id":"4-65","name":"ソリッドビジョンγ","kana":"そりっどびじょんがんま","traitText":null,"ruleText":"1ドローする。¶紫魔導 - 紫のカードが自分の戦場か自分の魔力ゾーンにあるなら「自分の戦場のガーディアン1体を手札に戻す」を発揮してもよい。","legacyText":"冥府発動","imageUrl":"https://one-draw.jp/ijinden/cardlist/004/card/04_065.png","expansion":45,"rarity":1,"type":3,"level":1,"color":64,"term":528,"trait":0,"legacy":2,"orderTable":374,"orderDeck":291},</text:p>
          </table:table-cell>
          <table:table-cell table:number-columns-repeated="16347"/>
        </table:table-row>
        <table:table-row table:style-name="ro2">
          <table:table-cell office:value-type="float" office:value="375" calcext:value-type="float">
            <text:p>375</text:p>
          </table:table-cell>
          <table:table-cell office:value-type="float" office:value="348" calcext:value-type="float">
            <text:p>348</text:p>
          </table:table-cell>
          <table:table-cell office:value-type="string" calcext:value-type="string">
            <text:p>4-66</text:p>
          </table:table-cell>
          <table:table-cell office:value-type="float" office:value="66" calcext:value-type="float">
            <text:p>66</text:p>
          </table:table-cell>
          <table:table-cell office:value-type="string" calcext:value-type="string">
            <text:p>遁甲式烈火</text:p>
          </table:table-cell>
          <table:table-cell office:value-type="string" calcext:value-type="string">
            <text:p>とんこうしきれっか</text:p>
          </table:table-cell>
          <table:table-cell office:value-type="string" calcext:value-type="string">
            <text:p>第４弾ブースターパック</text:p>
          </table:table-cell>
          <table:table-cell table:formula="of:=VLOOKUP([.G375];[$収録番号.$A$1:$収録番号.$B$9];2;0)" office:value-type="float" office:value="45" calcext:value-type="float">
            <text:p>45</text:p>
          </table:table-cell>
          <table:table-cell office:value-type="string" calcext:value-type="string">
            <text:p>R</text:p>
          </table:table-cell>
          <table:table-cell table:formula="of:=VLOOKUP([.I375];[$レアリティ番号.$A$1:$レアリティ番号.$B$4];2;0)" office:value-type="float" office:value="2" calcext:value-type="float">
            <text:p>2</text:p>
          </table:table-cell>
          <table:table-cell office:value-type="string" calcext:value-type="string">
            <text:p>マリョク</text:p>
          </table:table-cell>
          <table:table-cell table:formula="of:=VLOOKUP([.K375];[$種類番号.$A$1:$種類番号.$B$4];2;0)" office:value-type="float" office:value="4" calcext:value-type="float">
            <text:p>4</text:p>
          </table:table-cell>
          <table:table-cell office:value-type="string" calcext:value-type="string">
            <text:p>赤</text:p>
          </table:table-cell>
          <table:table-cell table:formula="of:=VLOOKUP([.M375];[$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7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75];[$特性番号.$A$1:$特性番号.$B$8];2;0);0)" office:value-type="float" office:value="0" calcext:value-type="float">
            <text:p>0</text:p>
          </table:table-cell>
          <table:table-cell office:value-type="string" calcext:value-type="string">
            <text:p>相手のターンのブロックステップが開始したとき、魔力ゾーンのこれを表にして発動できる。自分の戦場のガーディアン1体を山札の上に戻して、相手の戦場の起きているイジンすべてを破壊する。</text:p>
          </table:table-cell>
          <table:table-cell table:style-name="ce8" office:value-type="string" calcext:value-type="string">
            <text:p>喪神</text:p>
          </table:table-cell>
          <table:table-cell table:formula="of:=IFERROR(VLOOKUP([.$V375];[$遺業能力番号.$A$1:$遺業能力番号.$B$9];2;0);0)" office:value-type="float" office:value="9" calcext:value-type="float">
            <text:p>9</text:p>
          </table:table-cell>
          <table:table-cell office:value-type="string" calcext:value-type="string">
            <text:p>https://one-draw.jp/ijinden/cardlist/004/card/04_066.png</text:p>
          </table:table-cell>
          <table:table-cell table:formula="of:=CONCATENATE([$JSON.$A$1];[.$C375];[$JSON.$B$1];[.$E375];[$JSON.$C$1];[.$F375];[$JSON.$D$1];IF(ISNA([.$S375]);&quot;null&quot;;&quot;&quot;&quot;&quot;&amp;[.$S375]&amp;&quot;&quot;&quot;&quot;);[$JSON.$E$1];[.$U375];[$JSON.$F$1];IF(ISNA([.$V375]);&quot;null&quot;;&quot;&quot;&quot;&quot;&amp;[.$V375]&amp;&quot;&quot;&quot;&quot;);[$JSON.$G$1];[.$X375];[$JSON.$H$1];[.$H375];[$JSON.$I$1];[.J375];[$JSON.$J$1];[.$L375];[$JSON.$K$1];[.$O375];[$JSON.$L$1];[.$N375];[$JSON.$M$1];[.$R375];[$JSON.$N$1];[.$T375];[$JSON.$O$1];[.$W375];[$JSON.$P$1];[.$A375];[$JSON.$Q$1];[.$B375];[$JSON.$R$1])" office:value-type="string" office:string-value="{&quot;id&quot;:&quot;4-66&quot;,&quot;name&quot;:&quot;遁甲式烈火&quot;,&quot;kana&quot;:&quot;とんこうしきれっか&quot;,&quot;traitText&quot;:null,&quot;ruleText&quot;:&quot;相手のターンのブロックステップが開始したとき、魔力ゾーンのこれを表にして発動できる。自分の戦場のガーディアン1体を山札の上に戻して、相手の戦場の起きているイジンすべてを破壊する。&quot;,&quot;legacyText&quot;:&quot;喪神&quot;,&quot;imageUrl&quot;:&quot;https://one-draw.jp/ijinden/cardlist/004/card/04_066.png&quot;,&quot;expansion&quot;:45,&quot;rarity&quot;:2,&quot;type&quot;:4,&quot;level&quot;:1,&quot;color&quot;:1,&quot;term&quot;:0,&quot;trait&quot;:0,&quot;legacy&quot;:9,&quot;orderTable&quot;:375,&quot;orderDeck&quot;:348}," calcext:value-type="string">
            <text:p>{"id":"4-66","name":"遁甲式烈火","kana":"とんこうしきれっか","traitText":null,"ruleText":"相手のターンのブロックステップが開始したとき、魔力ゾーンのこれを表にして発動できる。自分の戦場のガーディアン1体を山札の上に戻して、相手の戦場の起きているイジンすべてを破壊する。","legacyText":"喪神","imageUrl":"https://one-draw.jp/ijinden/cardlist/004/card/04_066.png","expansion":45,"rarity":2,"type":4,"level":1,"color":1,"term":0,"trait":0,"legacy":9,"orderTable":375,"orderDeck":348},</text:p>
          </table:table-cell>
          <table:table-cell table:number-columns-repeated="16347"/>
        </table:table-row>
        <table:table-row table:style-name="ro2">
          <table:table-cell office:value-type="float" office:value="376" calcext:value-type="float">
            <text:p>376</text:p>
          </table:table-cell>
          <table:table-cell office:value-type="float" office:value="337" calcext:value-type="float">
            <text:p>337</text:p>
          </table:table-cell>
          <table:table-cell office:value-type="string" calcext:value-type="string">
            <text:p>4-67</text:p>
          </table:table-cell>
          <table:table-cell office:value-type="float" office:value="67" calcext:value-type="float">
            <text:p>67</text:p>
          </table:table-cell>
          <table:table-cell office:value-type="string" calcext:value-type="string">
            <text:p>レッドサークル</text:p>
          </table:table-cell>
          <table:table-cell office:value-type="string" calcext:value-type="string">
            <text:p>れっどさーくる</text:p>
          </table:table-cell>
          <table:table-cell office:value-type="string" calcext:value-type="string">
            <text:p>第４弾ブースターパック</text:p>
          </table:table-cell>
          <table:table-cell table:formula="of:=VLOOKUP([.G376];[$収録番号.$A$1:$収録番号.$B$9];2;0)" office:value-type="float" office:value="45" calcext:value-type="float">
            <text:p>45</text:p>
          </table:table-cell>
          <table:table-cell office:value-type="string" calcext:value-type="string">
            <text:p>N</text:p>
          </table:table-cell>
          <table:table-cell table:formula="of:=VLOOKUP([.I376];[$レアリティ番号.$A$1:$レアリティ番号.$B$4];2;0)" office:value-type="float" office:value="1" calcext:value-type="float">
            <text:p>1</text:p>
          </table:table-cell>
          <table:table-cell office:value-type="string" calcext:value-type="string">
            <text:p>マリョク</text:p>
          </table:table-cell>
          <table:table-cell table:formula="of:=VLOOKUP([.K376];[$種類番号.$A$1:$種類番号.$B$4];2;0)" office:value-type="float" office:value="4" calcext:value-type="float">
            <text:p>4</text:p>
          </table:table-cell>
          <table:table-cell office:value-type="string" calcext:value-type="string">
            <text:p>赤</text:p>
          </table:table-cell>
          <table:table-cell table:formula="of:=VLOOKUP([.M376];[$色番号.$A$1:$色番号.$B$10];2;0)" office:value-type="float" office:value="1" calcext:value-type="float">
            <text:p>1</text:p>
          </table:table-cell>
          <table:table-cell office:value-type="float" office:value="0" calcext:value-type="float">
            <text:p>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7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76];[$特性番号.$A$1:$特性番号.$B$8];2;0);0)" office:value-type="float" office:value="0" calcext:value-type="float">
            <text:p>0</text:p>
          </table:table-cell>
          <table:table-cell office:value-type="string" calcext:value-type="string">
            <text:p>自分がイジン召喚する際、そのイジンのレベルは3だけ下がる。¶イジンが自分の戦場に置かれたとき、これを裏にする。</text:p>
          </table:table-cell>
          <table:table-cell table:style-name="ce8" office:value-type="string" calcext:value-type="string">
            <text:p>手札に戻す</text:p>
          </table:table-cell>
          <table:table-cell table:formula="of:=IFERROR(VLOOKUP([.$V376];[$遺業能力番号.$A$1:$遺業能力番号.$B$9];2;0);0)" office:value-type="float" office:value="5" calcext:value-type="float">
            <text:p>5</text:p>
          </table:table-cell>
          <table:table-cell office:value-type="string" calcext:value-type="string">
            <text:p>https://one-draw.jp/ijinden/cardlist/004/card/04_067.png</text:p>
          </table:table-cell>
          <table:table-cell table:formula="of:=CONCATENATE([$JSON.$A$1];[.$C376];[$JSON.$B$1];[.$E376];[$JSON.$C$1];[.$F376];[$JSON.$D$1];IF(ISNA([.$S376]);&quot;null&quot;;&quot;&quot;&quot;&quot;&amp;[.$S376]&amp;&quot;&quot;&quot;&quot;);[$JSON.$E$1];[.$U376];[$JSON.$F$1];IF(ISNA([.$V376]);&quot;null&quot;;&quot;&quot;&quot;&quot;&amp;[.$V376]&amp;&quot;&quot;&quot;&quot;);[$JSON.$G$1];[.$X376];[$JSON.$H$1];[.$H376];[$JSON.$I$1];[.J376];[$JSON.$J$1];[.$L376];[$JSON.$K$1];[.$O376];[$JSON.$L$1];[.$N376];[$JSON.$M$1];[.$R376];[$JSON.$N$1];[.$T376];[$JSON.$O$1];[.$W376];[$JSON.$P$1];[.$A376];[$JSON.$Q$1];[.$B376];[$JSON.$R$1])" office:value-type="string" office:string-value="{&quot;id&quot;:&quot;4-67&quot;,&quot;name&quot;:&quot;レッドサークル&quot;,&quot;kana&quot;:&quot;れっどさーくる&quot;,&quot;traitText&quot;:null,&quot;ruleText&quot;:&quot;自分がイジン召喚する際、そのイジンのレベルは3だけ下がる。¶イジンが自分の戦場に置かれたとき、これを裏にする。&quot;,&quot;legacyText&quot;:&quot;手札に戻す&quot;,&quot;imageUrl&quot;:&quot;https://one-draw.jp/ijinden/cardlist/004/card/04_067.png&quot;,&quot;expansion&quot;:45,&quot;rarity&quot;:1,&quot;type&quot;:4,&quot;level&quot;:0,&quot;color&quot;:1,&quot;term&quot;:0,&quot;trait&quot;:0,&quot;legacy&quot;:5,&quot;orderTable&quot;:376,&quot;orderDeck&quot;:337}," calcext:value-type="string">
            <text:p>{"id":"4-67","name":"レッドサークル","kana":"れっどさーくる","traitText":null,"ruleText":"自分がイジン召喚する際、そのイジンのレベルは3だけ下がる。¶イジンが自分の戦場に置かれたとき、これを裏にする。","legacyText":"手札に戻す","imageUrl":"https://one-draw.jp/ijinden/cardlist/004/card/04_067.png","expansion":45,"rarity":1,"type":4,"level":0,"color":1,"term":0,"trait":0,"legacy":5,"orderTable":376,"orderDeck":337},</text:p>
          </table:table-cell>
          <table:table-cell table:number-columns-repeated="16347"/>
        </table:table-row>
        <table:table-row table:style-name="ro2">
          <table:table-cell office:value-type="float" office:value="377" calcext:value-type="float">
            <text:p>377</text:p>
          </table:table-cell>
          <table:table-cell office:value-type="float" office:value="354" calcext:value-type="float">
            <text:p>354</text:p>
          </table:table-cell>
          <table:table-cell office:value-type="string" calcext:value-type="string">
            <text:p>4-68</text:p>
          </table:table-cell>
          <table:table-cell office:value-type="float" office:value="68" calcext:value-type="float">
            <text:p>68</text:p>
          </table:table-cell>
          <table:table-cell office:value-type="string" calcext:value-type="string">
            <text:p>遁甲式水鏡</text:p>
          </table:table-cell>
          <table:table-cell office:value-type="string" calcext:value-type="string">
            <text:p>とんこうしきみかがみ</text:p>
          </table:table-cell>
          <table:table-cell office:value-type="string" calcext:value-type="string">
            <text:p>第４弾ブースターパック</text:p>
          </table:table-cell>
          <table:table-cell table:formula="of:=VLOOKUP([.G377];[$収録番号.$A$1:$収録番号.$B$9];2;0)" office:value-type="float" office:value="45" calcext:value-type="float">
            <text:p>45</text:p>
          </table:table-cell>
          <table:table-cell office:value-type="string" calcext:value-type="string">
            <text:p>R</text:p>
          </table:table-cell>
          <table:table-cell table:formula="of:=VLOOKUP([.I377];[$レアリティ番号.$A$1:$レアリティ番号.$B$4];2;0)" office:value-type="float" office:value="2" calcext:value-type="float">
            <text:p>2</text:p>
          </table:table-cell>
          <table:table-cell office:value-type="string" calcext:value-type="string">
            <text:p>マリョク</text:p>
          </table:table-cell>
          <table:table-cell table:formula="of:=VLOOKUP([.K377];[$種類番号.$A$1:$種類番号.$B$4];2;0)" office:value-type="float" office:value="4" calcext:value-type="float">
            <text:p>4</text:p>
          </table:table-cell>
          <table:table-cell office:value-type="string" calcext:value-type="string">
            <text:p>青</text:p>
          </table:table-cell>
          <table:table-cell table:formula="of:=VLOOKUP([.M377];[$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7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77];[$特性番号.$A$1:$特性番号.$B$8];2;0);0)" office:value-type="float" office:value="0" calcext:value-type="float">
            <text:p>0</text:p>
          </table:table-cell>
          <table:table-cell office:value-type="string" calcext:value-type="string">
            <text:p>相手のターンのブロックステップが開始したとき、魔力ゾーンのこれを表にして発動できる。自分の戦場のガーディアン1体を山札の上に戻して、戦場の寝ているイジンすべてを手札に戻す。</text:p>
          </table:table-cell>
          <table:table-cell table:style-name="ce8" office:value-type="string" calcext:value-type="string">
            <text:p>喪神</text:p>
          </table:table-cell>
          <table:table-cell table:formula="of:=IFERROR(VLOOKUP([.$V377];[$遺業能力番号.$A$1:$遺業能力番号.$B$9];2;0);0)" office:value-type="float" office:value="9" calcext:value-type="float">
            <text:p>9</text:p>
          </table:table-cell>
          <table:table-cell office:value-type="string" calcext:value-type="string">
            <text:p>https://one-draw.jp/ijinden/cardlist/004/card/04_068.png</text:p>
          </table:table-cell>
          <table:table-cell table:formula="of:=CONCATENATE([$JSON.$A$1];[.$C377];[$JSON.$B$1];[.$E377];[$JSON.$C$1];[.$F377];[$JSON.$D$1];IF(ISNA([.$S377]);&quot;null&quot;;&quot;&quot;&quot;&quot;&amp;[.$S377]&amp;&quot;&quot;&quot;&quot;);[$JSON.$E$1];[.$U377];[$JSON.$F$1];IF(ISNA([.$V377]);&quot;null&quot;;&quot;&quot;&quot;&quot;&amp;[.$V377]&amp;&quot;&quot;&quot;&quot;);[$JSON.$G$1];[.$X377];[$JSON.$H$1];[.$H377];[$JSON.$I$1];[.J377];[$JSON.$J$1];[.$L377];[$JSON.$K$1];[.$O377];[$JSON.$L$1];[.$N377];[$JSON.$M$1];[.$R377];[$JSON.$N$1];[.$T377];[$JSON.$O$1];[.$W377];[$JSON.$P$1];[.$A377];[$JSON.$Q$1];[.$B377];[$JSON.$R$1])" office:value-type="string" office:string-value="{&quot;id&quot;:&quot;4-68&quot;,&quot;name&quot;:&quot;遁甲式水鏡&quot;,&quot;kana&quot;:&quot;とんこうしきみかがみ&quot;,&quot;traitText&quot;:null,&quot;ruleText&quot;:&quot;相手のターンのブロックステップが開始したとき、魔力ゾーンのこれを表にして発動できる。自分の戦場のガーディアン1体を山札の上に戻して、戦場の寝ているイジンすべてを手札に戻す。&quot;,&quot;legacyText&quot;:&quot;喪神&quot;,&quot;imageUrl&quot;:&quot;https://one-draw.jp/ijinden/cardlist/004/card/04_068.png&quot;,&quot;expansion&quot;:45,&quot;rarity&quot;:2,&quot;type&quot;:4,&quot;level&quot;:1,&quot;color&quot;:2,&quot;term&quot;:0,&quot;trait&quot;:0,&quot;legacy&quot;:9,&quot;orderTable&quot;:377,&quot;orderDeck&quot;:354}," calcext:value-type="string">
            <text:p>{"id":"4-68","name":"遁甲式水鏡","kana":"とんこうしきみかがみ","traitText":null,"ruleText":"相手のターンのブロックステップが開始したとき、魔力ゾーンのこれを表にして発動できる。自分の戦場のガーディアン1体を山札の上に戻して、戦場の寝ているイジンすべてを手札に戻す。","legacyText":"喪神","imageUrl":"https://one-draw.jp/ijinden/cardlist/004/card/04_068.png","expansion":45,"rarity":2,"type":4,"level":1,"color":2,"term":0,"trait":0,"legacy":9,"orderTable":377,"orderDeck":354},</text:p>
          </table:table-cell>
          <table:table-cell table:number-columns-repeated="16347"/>
        </table:table-row>
        <table:table-row table:style-name="ro2">
          <table:table-cell office:value-type="float" office:value="378" calcext:value-type="float">
            <text:p>378</text:p>
          </table:table-cell>
          <table:table-cell office:value-type="float" office:value="338" calcext:value-type="float">
            <text:p>338</text:p>
          </table:table-cell>
          <table:table-cell office:value-type="string" calcext:value-type="string">
            <text:p>4-69</text:p>
          </table:table-cell>
          <table:table-cell office:value-type="float" office:value="69" calcext:value-type="float">
            <text:p>69</text:p>
          </table:table-cell>
          <table:table-cell office:value-type="string" calcext:value-type="string">
            <text:p>ブルーサークル</text:p>
          </table:table-cell>
          <table:table-cell office:value-type="string" calcext:value-type="string">
            <text:p>ぶるーさーくる</text:p>
          </table:table-cell>
          <table:table-cell office:value-type="string" calcext:value-type="string">
            <text:p>第４弾ブースターパック</text:p>
          </table:table-cell>
          <table:table-cell table:formula="of:=VLOOKUP([.G378];[$収録番号.$A$1:$収録番号.$B$9];2;0)" office:value-type="float" office:value="45" calcext:value-type="float">
            <text:p>45</text:p>
          </table:table-cell>
          <table:table-cell office:value-type="string" calcext:value-type="string">
            <text:p>N</text:p>
          </table:table-cell>
          <table:table-cell table:formula="of:=VLOOKUP([.I378];[$レアリティ番号.$A$1:$レアリティ番号.$B$4];2;0)" office:value-type="float" office:value="1" calcext:value-type="float">
            <text:p>1</text:p>
          </table:table-cell>
          <table:table-cell office:value-type="string" calcext:value-type="string">
            <text:p>マリョク</text:p>
          </table:table-cell>
          <table:table-cell table:formula="of:=VLOOKUP([.K378];[$種類番号.$A$1:$種類番号.$B$4];2;0)" office:value-type="float" office:value="4" calcext:value-type="float">
            <text:p>4</text:p>
          </table:table-cell>
          <table:table-cell office:value-type="string" calcext:value-type="string">
            <text:p>青</text:p>
          </table:table-cell>
          <table:table-cell table:formula="of:=VLOOKUP([.M378];[$色番号.$A$1:$色番号.$B$10];2;0)" office:value-type="float" office:value="2" calcext:value-type="float">
            <text:p>2</text:p>
          </table:table-cell>
          <table:table-cell office:value-type="float" office:value="0" calcext:value-type="float">
            <text:p>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7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78];[$特性番号.$A$1:$特性番号.$B$8];2;0);0)" office:value-type="float" office:value="0" calcext:value-type="float">
            <text:p>0</text:p>
          </table:table-cell>
          <table:table-cell office:value-type="string" calcext:value-type="string">
            <text:p>自分がイジン召喚する際、そのイジンのレベルは3だけ下がる。¶イジンが自分の戦場に置かれたとき、これを裏にする。</text:p>
          </table:table-cell>
          <table:table-cell table:style-name="ce8" office:value-type="string" calcext:value-type="string">
            <text:p>手札に戻す</text:p>
          </table:table-cell>
          <table:table-cell table:formula="of:=IFERROR(VLOOKUP([.$V378];[$遺業能力番号.$A$1:$遺業能力番号.$B$9];2;0);0)" office:value-type="float" office:value="5" calcext:value-type="float">
            <text:p>5</text:p>
          </table:table-cell>
          <table:table-cell office:value-type="string" calcext:value-type="string">
            <text:p>https://one-draw.jp/ijinden/cardlist/004/card/04_069.png</text:p>
          </table:table-cell>
          <table:table-cell table:formula="of:=CONCATENATE([$JSON.$A$1];[.$C378];[$JSON.$B$1];[.$E378];[$JSON.$C$1];[.$F378];[$JSON.$D$1];IF(ISNA([.$S378]);&quot;null&quot;;&quot;&quot;&quot;&quot;&amp;[.$S378]&amp;&quot;&quot;&quot;&quot;);[$JSON.$E$1];[.$U378];[$JSON.$F$1];IF(ISNA([.$V378]);&quot;null&quot;;&quot;&quot;&quot;&quot;&amp;[.$V378]&amp;&quot;&quot;&quot;&quot;);[$JSON.$G$1];[.$X378];[$JSON.$H$1];[.$H378];[$JSON.$I$1];[.J378];[$JSON.$J$1];[.$L378];[$JSON.$K$1];[.$O378];[$JSON.$L$1];[.$N378];[$JSON.$M$1];[.$R378];[$JSON.$N$1];[.$T378];[$JSON.$O$1];[.$W378];[$JSON.$P$1];[.$A378];[$JSON.$Q$1];[.$B378];[$JSON.$R$1])" office:value-type="string" office:string-value="{&quot;id&quot;:&quot;4-69&quot;,&quot;name&quot;:&quot;ブルーサークル&quot;,&quot;kana&quot;:&quot;ぶるーさーくる&quot;,&quot;traitText&quot;:null,&quot;ruleText&quot;:&quot;自分がイジン召喚する際、そのイジンのレベルは3だけ下がる。¶イジンが自分の戦場に置かれたとき、これを裏にする。&quot;,&quot;legacyText&quot;:&quot;手札に戻す&quot;,&quot;imageUrl&quot;:&quot;https://one-draw.jp/ijinden/cardlist/004/card/04_069.png&quot;,&quot;expansion&quot;:45,&quot;rarity&quot;:1,&quot;type&quot;:4,&quot;level&quot;:0,&quot;color&quot;:2,&quot;term&quot;:0,&quot;trait&quot;:0,&quot;legacy&quot;:5,&quot;orderTable&quot;:378,&quot;orderDeck&quot;:338}," calcext:value-type="string">
            <text:p>{"id":"4-69","name":"ブルーサークル","kana":"ぶるーさーくる","traitText":null,"ruleText":"自分がイジン召喚する際、そのイジンのレベルは3だけ下がる。¶イジンが自分の戦場に置かれたとき、これを裏にする。","legacyText":"手札に戻す","imageUrl":"https://one-draw.jp/ijinden/cardlist/004/card/04_069.png","expansion":45,"rarity":1,"type":4,"level":0,"color":2,"term":0,"trait":0,"legacy":5,"orderTable":378,"orderDeck":338},</text:p>
          </table:table-cell>
          <table:table-cell table:number-columns-repeated="16347"/>
        </table:table-row>
        <table:table-row table:style-name="ro2">
          <table:table-cell office:value-type="float" office:value="379" calcext:value-type="float">
            <text:p>379</text:p>
          </table:table-cell>
          <table:table-cell office:value-type="float" office:value="360" calcext:value-type="float">
            <text:p>360</text:p>
          </table:table-cell>
          <table:table-cell office:value-type="string" calcext:value-type="string">
            <text:p>4-70</text:p>
          </table:table-cell>
          <table:table-cell office:value-type="float" office:value="70" calcext:value-type="float">
            <text:p>70</text:p>
          </table:table-cell>
          <table:table-cell office:value-type="string" calcext:value-type="string">
            <text:p>遁甲式木蓮</text:p>
          </table:table-cell>
          <table:table-cell office:value-type="string" calcext:value-type="string">
            <text:p>とんこうしきもくれん</text:p>
          </table:table-cell>
          <table:table-cell office:value-type="string" calcext:value-type="string">
            <text:p>第４弾ブースターパック</text:p>
          </table:table-cell>
          <table:table-cell table:formula="of:=VLOOKUP([.G379];[$収録番号.$A$1:$収録番号.$B$9];2;0)" office:value-type="float" office:value="45" calcext:value-type="float">
            <text:p>45</text:p>
          </table:table-cell>
          <table:table-cell office:value-type="string" calcext:value-type="string">
            <text:p>R</text:p>
          </table:table-cell>
          <table:table-cell table:formula="of:=VLOOKUP([.I379];[$レアリティ番号.$A$1:$レアリティ番号.$B$4];2;0)" office:value-type="float" office:value="2" calcext:value-type="float">
            <text:p>2</text:p>
          </table:table-cell>
          <table:table-cell office:value-type="string" calcext:value-type="string">
            <text:p>マリョク</text:p>
          </table:table-cell>
          <table:table-cell table:formula="of:=VLOOKUP([.K379];[$種類番号.$A$1:$種類番号.$B$4];2;0)" office:value-type="float" office:value="4" calcext:value-type="float">
            <text:p>4</text:p>
          </table:table-cell>
          <table:table-cell office:value-type="string" calcext:value-type="string">
            <text:p>緑</text:p>
          </table:table-cell>
          <table:table-cell table:formula="of:=VLOOKUP([.M379];[$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7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79];[$特性番号.$A$1:$特性番号.$B$8];2;0);0)" office:value-type="float" office:value="0" calcext:value-type="float">
            <text:p>0</text:p>
          </table:table-cell>
          <table:table-cell office:value-type="string" calcext:value-type="string">
            <text:p>相手のターンのブロックステップが開始したとき、魔力ゾーンのこれを表にして発動できる。自分の戦場のガーディアン1体を山札の上に戻して、アタッカーすべてをアタッカーでない状態にする。</text:p>
          </table:table-cell>
          <table:table-cell table:style-name="ce8" office:value-type="string" calcext:value-type="string">
            <text:p>喪神</text:p>
          </table:table-cell>
          <table:table-cell table:formula="of:=IFERROR(VLOOKUP([.$V379];[$遺業能力番号.$A$1:$遺業能力番号.$B$9];2;0);0)" office:value-type="float" office:value="9" calcext:value-type="float">
            <text:p>9</text:p>
          </table:table-cell>
          <table:table-cell office:value-type="string" calcext:value-type="string">
            <text:p>https://one-draw.jp/ijinden/cardlist/004/card/04_070.png</text:p>
          </table:table-cell>
          <table:table-cell table:formula="of:=CONCATENATE([$JSON.$A$1];[.$C379];[$JSON.$B$1];[.$E379];[$JSON.$C$1];[.$F379];[$JSON.$D$1];IF(ISNA([.$S379]);&quot;null&quot;;&quot;&quot;&quot;&quot;&amp;[.$S379]&amp;&quot;&quot;&quot;&quot;);[$JSON.$E$1];[.$U379];[$JSON.$F$1];IF(ISNA([.$V379]);&quot;null&quot;;&quot;&quot;&quot;&quot;&amp;[.$V379]&amp;&quot;&quot;&quot;&quot;);[$JSON.$G$1];[.$X379];[$JSON.$H$1];[.$H379];[$JSON.$I$1];[.J379];[$JSON.$J$1];[.$L379];[$JSON.$K$1];[.$O379];[$JSON.$L$1];[.$N379];[$JSON.$M$1];[.$R379];[$JSON.$N$1];[.$T379];[$JSON.$O$1];[.$W379];[$JSON.$P$1];[.$A379];[$JSON.$Q$1];[.$B379];[$JSON.$R$1])" office:value-type="string" office:string-value="{&quot;id&quot;:&quot;4-70&quot;,&quot;name&quot;:&quot;遁甲式木蓮&quot;,&quot;kana&quot;:&quot;とんこうしきもくれん&quot;,&quot;traitText&quot;:null,&quot;ruleText&quot;:&quot;相手のターンのブロックステップが開始したとき、魔力ゾーンのこれを表にして発動できる。自分の戦場のガーディアン1体を山札の上に戻して、アタッカーすべてをアタッカーでない状態にする。&quot;,&quot;legacyText&quot;:&quot;喪神&quot;,&quot;imageUrl&quot;:&quot;https://one-draw.jp/ijinden/cardlist/004/card/04_070.png&quot;,&quot;expansion&quot;:45,&quot;rarity&quot;:2,&quot;type&quot;:4,&quot;level&quot;:1,&quot;color&quot;:4,&quot;term&quot;:0,&quot;trait&quot;:0,&quot;legacy&quot;:9,&quot;orderTable&quot;:379,&quot;orderDeck&quot;:360}," calcext:value-type="string">
            <text:p>{"id":"4-70","name":"遁甲式木蓮","kana":"とんこうしきもくれん","traitText":null,"ruleText":"相手のターンのブロックステップが開始したとき、魔力ゾーンのこれを表にして発動できる。自分の戦場のガーディアン1体を山札の上に戻して、アタッカーすべてをアタッカーでない状態にする。","legacyText":"喪神","imageUrl":"https://one-draw.jp/ijinden/cardlist/004/card/04_070.png","expansion":45,"rarity":2,"type":4,"level":1,"color":4,"term":0,"trait":0,"legacy":9,"orderTable":379,"orderDeck":360},</text:p>
          </table:table-cell>
          <table:table-cell table:number-columns-repeated="16347"/>
        </table:table-row>
        <table:table-row table:style-name="ro2">
          <table:table-cell office:value-type="float" office:value="380" calcext:value-type="float">
            <text:p>380</text:p>
          </table:table-cell>
          <table:table-cell office:value-type="float" office:value="339" calcext:value-type="float">
            <text:p>339</text:p>
          </table:table-cell>
          <table:table-cell office:value-type="string" calcext:value-type="string">
            <text:p>4-71</text:p>
          </table:table-cell>
          <table:table-cell office:value-type="float" office:value="71" calcext:value-type="float">
            <text:p>71</text:p>
          </table:table-cell>
          <table:table-cell office:value-type="string" calcext:value-type="string">
            <text:p>グリーンサークル</text:p>
          </table:table-cell>
          <table:table-cell office:value-type="string" calcext:value-type="string">
            <text:p>ぐりーんさーくる</text:p>
          </table:table-cell>
          <table:table-cell office:value-type="string" calcext:value-type="string">
            <text:p>第４弾ブースターパック</text:p>
          </table:table-cell>
          <table:table-cell table:formula="of:=VLOOKUP([.G380];[$収録番号.$A$1:$収録番号.$B$9];2;0)" office:value-type="float" office:value="45" calcext:value-type="float">
            <text:p>45</text:p>
          </table:table-cell>
          <table:table-cell office:value-type="string" calcext:value-type="string">
            <text:p>N</text:p>
          </table:table-cell>
          <table:table-cell table:formula="of:=VLOOKUP([.I380];[$レアリティ番号.$A$1:$レアリティ番号.$B$4];2;0)" office:value-type="float" office:value="1" calcext:value-type="float">
            <text:p>1</text:p>
          </table:table-cell>
          <table:table-cell office:value-type="string" calcext:value-type="string">
            <text:p>マリョク</text:p>
          </table:table-cell>
          <table:table-cell table:formula="of:=VLOOKUP([.K380];[$種類番号.$A$1:$種類番号.$B$4];2;0)" office:value-type="float" office:value="4" calcext:value-type="float">
            <text:p>4</text:p>
          </table:table-cell>
          <table:table-cell office:value-type="string" calcext:value-type="string">
            <text:p>緑</text:p>
          </table:table-cell>
          <table:table-cell table:formula="of:=VLOOKUP([.M380];[$色番号.$A$1:$色番号.$B$10];2;0)" office:value-type="float" office:value="4" calcext:value-type="float">
            <text:p>4</text:p>
          </table:table-cell>
          <table:table-cell office:value-type="float" office:value="0" calcext:value-type="float">
            <text:p>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8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80];[$特性番号.$A$1:$特性番号.$B$8];2;0);0)" office:value-type="float" office:value="0" calcext:value-type="float">
            <text:p>0</text:p>
          </table:table-cell>
          <table:table-cell office:value-type="string" calcext:value-type="string">
            <text:p>自分がイジン召喚する際、そのイジンのレベルは3だけ下がる。¶イジンが自分の戦場に置かれたとき、これを裏にする。</text:p>
          </table:table-cell>
          <table:table-cell table:style-name="ce8" office:value-type="string" calcext:value-type="string">
            <text:p>手札に戻す</text:p>
          </table:table-cell>
          <table:table-cell table:formula="of:=IFERROR(VLOOKUP([.$V380];[$遺業能力番号.$A$1:$遺業能力番号.$B$9];2;0);0)" office:value-type="float" office:value="5" calcext:value-type="float">
            <text:p>5</text:p>
          </table:table-cell>
          <table:table-cell office:value-type="string" calcext:value-type="string">
            <text:p>https://one-draw.jp/ijinden/cardlist/004/card/04_071.png</text:p>
          </table:table-cell>
          <table:table-cell table:formula="of:=CONCATENATE([$JSON.$A$1];[.$C380];[$JSON.$B$1];[.$E380];[$JSON.$C$1];[.$F380];[$JSON.$D$1];IF(ISNA([.$S380]);&quot;null&quot;;&quot;&quot;&quot;&quot;&amp;[.$S380]&amp;&quot;&quot;&quot;&quot;);[$JSON.$E$1];[.$U380];[$JSON.$F$1];IF(ISNA([.$V380]);&quot;null&quot;;&quot;&quot;&quot;&quot;&amp;[.$V380]&amp;&quot;&quot;&quot;&quot;);[$JSON.$G$1];[.$X380];[$JSON.$H$1];[.$H380];[$JSON.$I$1];[.J380];[$JSON.$J$1];[.$L380];[$JSON.$K$1];[.$O380];[$JSON.$L$1];[.$N380];[$JSON.$M$1];[.$R380];[$JSON.$N$1];[.$T380];[$JSON.$O$1];[.$W380];[$JSON.$P$1];[.$A380];[$JSON.$Q$1];[.$B380];[$JSON.$R$1])" office:value-type="string" office:string-value="{&quot;id&quot;:&quot;4-71&quot;,&quot;name&quot;:&quot;グリーンサークル&quot;,&quot;kana&quot;:&quot;ぐりーんさーくる&quot;,&quot;traitText&quot;:null,&quot;ruleText&quot;:&quot;自分がイジン召喚する際、そのイジンのレベルは3だけ下がる。¶イジンが自分の戦場に置かれたとき、これを裏にする。&quot;,&quot;legacyText&quot;:&quot;手札に戻す&quot;,&quot;imageUrl&quot;:&quot;https://one-draw.jp/ijinden/cardlist/004/card/04_071.png&quot;,&quot;expansion&quot;:45,&quot;rarity&quot;:1,&quot;type&quot;:4,&quot;level&quot;:0,&quot;color&quot;:4,&quot;term&quot;:0,&quot;trait&quot;:0,&quot;legacy&quot;:5,&quot;orderTable&quot;:380,&quot;orderDeck&quot;:339}," calcext:value-type="string">
            <text:p>{"id":"4-71","name":"グリーンサークル","kana":"ぐりーんさーくる","traitText":null,"ruleText":"自分がイジン召喚する際、そのイジンのレベルは3だけ下がる。¶イジンが自分の戦場に置かれたとき、これを裏にする。","legacyText":"手札に戻す","imageUrl":"https://one-draw.jp/ijinden/cardlist/004/card/04_071.png","expansion":45,"rarity":1,"type":4,"level":0,"color":4,"term":0,"trait":0,"legacy":5,"orderTable":380,"orderDeck":339},</text:p>
          </table:table-cell>
          <table:table-cell table:number-columns-repeated="16347"/>
        </table:table-row>
        <table:table-row table:style-name="ro2">
          <table:table-cell office:value-type="float" office:value="381" calcext:value-type="float">
            <text:p>381</text:p>
          </table:table-cell>
          <table:table-cell office:value-type="float" office:value="365" calcext:value-type="float">
            <text:p>365</text:p>
          </table:table-cell>
          <table:table-cell office:value-type="string" calcext:value-type="string">
            <text:p>4-72</text:p>
          </table:table-cell>
          <table:table-cell office:value-type="float" office:value="72" calcext:value-type="float">
            <text:p>72</text:p>
          </table:table-cell>
          <table:table-cell office:value-type="string" calcext:value-type="string">
            <text:p>ラ・コロール</text:p>
          </table:table-cell>
          <table:table-cell office:value-type="string" calcext:value-type="string">
            <text:p>らころーる</text:p>
          </table:table-cell>
          <table:table-cell office:value-type="string" calcext:value-type="string">
            <text:p>第４弾ブースターパック</text:p>
          </table:table-cell>
          <table:table-cell table:formula="of:=VLOOKUP([.G381];[$収録番号.$A$1:$収録番号.$B$9];2;0)" office:value-type="float" office:value="45" calcext:value-type="float">
            <text:p>45</text:p>
          </table:table-cell>
          <table:table-cell office:value-type="string" calcext:value-type="string">
            <text:p>N</text:p>
          </table:table-cell>
          <table:table-cell table:formula="of:=VLOOKUP([.I381];[$レアリティ番号.$A$1:$レアリティ番号.$B$4];2;0)" office:value-type="float" office:value="1" calcext:value-type="float">
            <text:p>1</text:p>
          </table:table-cell>
          <table:table-cell office:value-type="string" calcext:value-type="string">
            <text:p>マリョク</text:p>
          </table:table-cell>
          <table:table-cell table:formula="of:=VLOOKUP([.K381];[$種類番号.$A$1:$種類番号.$B$4];2;0)" office:value-type="float" office:value="4" calcext:value-type="float">
            <text:p>4</text:p>
          </table:table-cell>
          <table:table-cell office:value-type="string" calcext:value-type="string">
            <text:p>黄</text:p>
          </table:table-cell>
          <table:table-cell table:formula="of:=VLOOKUP([.M381];[$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8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81];[$特性番号.$A$1:$特性番号.$B$8];2;0);0)" office:value-type="float" office:value="0" calcext:value-type="float">
            <text:p>0</text:p>
          </table:table-cell>
          <table:table-cell office:value-type="string" calcext:value-type="string">
            <text:p>魔力ゾーンに置かれたとき、戦場のレベル2以下のイジン1体を指定して発動できる。そのイジンを山札の下に戻す。自分は、このターンに限り「バトルできない」を得る。</text:p>
          </table:table-cell>
          <table:table-cell table:style-name="ce8" office:value-type="string" calcext:value-type="string">
            <text:p>復元</text:p>
          </table:table-cell>
          <table:table-cell table:formula="of:=IFERROR(VLOOKUP([.$V381];[$遺業能力番号.$A$1:$遺業能力番号.$B$9];2;0);0)" office:value-type="float" office:value="3" calcext:value-type="float">
            <text:p>3</text:p>
          </table:table-cell>
          <table:table-cell office:value-type="string" calcext:value-type="string">
            <text:p>https://one-draw.jp/ijinden/cardlist/004/card/04_072.png</text:p>
          </table:table-cell>
          <table:table-cell table:formula="of:=CONCATENATE([$JSON.$A$1];[.$C381];[$JSON.$B$1];[.$E381];[$JSON.$C$1];[.$F381];[$JSON.$D$1];IF(ISNA([.$S381]);&quot;null&quot;;&quot;&quot;&quot;&quot;&amp;[.$S381]&amp;&quot;&quot;&quot;&quot;);[$JSON.$E$1];[.$U381];[$JSON.$F$1];IF(ISNA([.$V381]);&quot;null&quot;;&quot;&quot;&quot;&quot;&amp;[.$V381]&amp;&quot;&quot;&quot;&quot;);[$JSON.$G$1];[.$X381];[$JSON.$H$1];[.$H381];[$JSON.$I$1];[.J381];[$JSON.$J$1];[.$L381];[$JSON.$K$1];[.$O381];[$JSON.$L$1];[.$N381];[$JSON.$M$1];[.$R381];[$JSON.$N$1];[.$T381];[$JSON.$O$1];[.$W381];[$JSON.$P$1];[.$A381];[$JSON.$Q$1];[.$B381];[$JSON.$R$1])" office:value-type="string" office:string-value="{&quot;id&quot;:&quot;4-72&quot;,&quot;name&quot;:&quot;ラ・コロール&quot;,&quot;kana&quot;:&quot;らころーる&quot;,&quot;traitText&quot;:null,&quot;ruleText&quot;:&quot;魔力ゾーンに置かれたとき、戦場のレベル2以下のイジン1体を指定して発動できる。そのイジンを山札の下に戻す。自分は、このターンに限り「バトルできない」を得る。&quot;,&quot;legacyText&quot;:&quot;復元&quot;,&quot;imageUrl&quot;:&quot;https://one-draw.jp/ijinden/cardlist/004/card/04_072.png&quot;,&quot;expansion&quot;:45,&quot;rarity&quot;:1,&quot;type&quot;:4,&quot;level&quot;:1,&quot;color&quot;:8,&quot;term&quot;:0,&quot;trait&quot;:0,&quot;legacy&quot;:3,&quot;orderTable&quot;:381,&quot;orderDeck&quot;:365}," calcext:value-type="string">
            <text:p>{"id":"4-72","name":"ラ・コロール","kana":"らころーる","traitText":null,"ruleText":"魔力ゾーンに置かれたとき、戦場のレベル2以下のイジン1体を指定して発動できる。そのイジンを山札の下に戻す。自分は、このターンに限り「バトルできない」を得る。","legacyText":"復元","imageUrl":"https://one-draw.jp/ijinden/cardlist/004/card/04_072.png","expansion":45,"rarity":1,"type":4,"level":1,"color":8,"term":0,"trait":0,"legacy":3,"orderTable":381,"orderDeck":365},</text:p>
          </table:table-cell>
          <table:table-cell table:number-columns-repeated="16347"/>
        </table:table-row>
        <table:table-row table:style-name="ro2">
          <table:table-cell office:value-type="float" office:value="382" calcext:value-type="float">
            <text:p>382</text:p>
          </table:table-cell>
          <table:table-cell office:value-type="float" office:value="340" calcext:value-type="float">
            <text:p>340</text:p>
          </table:table-cell>
          <table:table-cell office:value-type="string" calcext:value-type="string">
            <text:p>4-73</text:p>
          </table:table-cell>
          <table:table-cell office:value-type="float" office:value="73" calcext:value-type="float">
            <text:p>73</text:p>
          </table:table-cell>
          <table:table-cell office:value-type="string" calcext:value-type="string">
            <text:p>イエローサークル</text:p>
          </table:table-cell>
          <table:table-cell office:value-type="string" calcext:value-type="string">
            <text:p>いえろーさーくる</text:p>
          </table:table-cell>
          <table:table-cell office:value-type="string" calcext:value-type="string">
            <text:p>第４弾ブースターパック</text:p>
          </table:table-cell>
          <table:table-cell table:formula="of:=VLOOKUP([.G382];[$収録番号.$A$1:$収録番号.$B$9];2;0)" office:value-type="float" office:value="45" calcext:value-type="float">
            <text:p>45</text:p>
          </table:table-cell>
          <table:table-cell office:value-type="string" calcext:value-type="string">
            <text:p>N</text:p>
          </table:table-cell>
          <table:table-cell table:formula="of:=VLOOKUP([.I382];[$レアリティ番号.$A$1:$レアリティ番号.$B$4];2;0)" office:value-type="float" office:value="1" calcext:value-type="float">
            <text:p>1</text:p>
          </table:table-cell>
          <table:table-cell office:value-type="string" calcext:value-type="string">
            <text:p>マリョク</text:p>
          </table:table-cell>
          <table:table-cell table:formula="of:=VLOOKUP([.K382];[$種類番号.$A$1:$種類番号.$B$4];2;0)" office:value-type="float" office:value="4" calcext:value-type="float">
            <text:p>4</text:p>
          </table:table-cell>
          <table:table-cell office:value-type="string" calcext:value-type="string">
            <text:p>黄</text:p>
          </table:table-cell>
          <table:table-cell table:formula="of:=VLOOKUP([.M382];[$色番号.$A$1:$色番号.$B$10];2;0)" office:value-type="float" office:value="8" calcext:value-type="float">
            <text:p>8</text:p>
          </table:table-cell>
          <table:table-cell office:value-type="float" office:value="0" calcext:value-type="float">
            <text:p>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8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82];[$特性番号.$A$1:$特性番号.$B$8];2;0);0)" office:value-type="float" office:value="0" calcext:value-type="float">
            <text:p>0</text:p>
          </table:table-cell>
          <table:table-cell office:value-type="string" calcext:value-type="string">
            <text:p>自分がイジン召喚する際、そのイジンのレベルは3だけ下がる。¶イジンが自分の戦場に置かれたとき、これを裏にする。</text:p>
          </table:table-cell>
          <table:table-cell table:style-name="ce8" office:value-type="string" calcext:value-type="string">
            <text:p>手札に戻す</text:p>
          </table:table-cell>
          <table:table-cell table:formula="of:=IFERROR(VLOOKUP([.$V382];[$遺業能力番号.$A$1:$遺業能力番号.$B$9];2;0);0)" office:value-type="float" office:value="5" calcext:value-type="float">
            <text:p>5</text:p>
          </table:table-cell>
          <table:table-cell office:value-type="string" calcext:value-type="string">
            <text:p>https://one-draw.jp/ijinden/cardlist/004/card/04_073.png</text:p>
          </table:table-cell>
          <table:table-cell table:formula="of:=CONCATENATE([$JSON.$A$1];[.$C382];[$JSON.$B$1];[.$E382];[$JSON.$C$1];[.$F382];[$JSON.$D$1];IF(ISNA([.$S382]);&quot;null&quot;;&quot;&quot;&quot;&quot;&amp;[.$S382]&amp;&quot;&quot;&quot;&quot;);[$JSON.$E$1];[.$U382];[$JSON.$F$1];IF(ISNA([.$V382]);&quot;null&quot;;&quot;&quot;&quot;&quot;&amp;[.$V382]&amp;&quot;&quot;&quot;&quot;);[$JSON.$G$1];[.$X382];[$JSON.$H$1];[.$H382];[$JSON.$I$1];[.J382];[$JSON.$J$1];[.$L382];[$JSON.$K$1];[.$O382];[$JSON.$L$1];[.$N382];[$JSON.$M$1];[.$R382];[$JSON.$N$1];[.$T382];[$JSON.$O$1];[.$W382];[$JSON.$P$1];[.$A382];[$JSON.$Q$1];[.$B382];[$JSON.$R$1])" office:value-type="string" office:string-value="{&quot;id&quot;:&quot;4-73&quot;,&quot;name&quot;:&quot;イエローサークル&quot;,&quot;kana&quot;:&quot;いえろーさーくる&quot;,&quot;traitText&quot;:null,&quot;ruleText&quot;:&quot;自分がイジン召喚する際、そのイジンのレベルは3だけ下がる。¶イジンが自分の戦場に置かれたとき、これを裏にする。&quot;,&quot;legacyText&quot;:&quot;手札に戻す&quot;,&quot;imageUrl&quot;:&quot;https://one-draw.jp/ijinden/cardlist/004/card/04_073.png&quot;,&quot;expansion&quot;:45,&quot;rarity&quot;:1,&quot;type&quot;:4,&quot;level&quot;:0,&quot;color&quot;:8,&quot;term&quot;:0,&quot;trait&quot;:0,&quot;legacy&quot;:5,&quot;orderTable&quot;:382,&quot;orderDeck&quot;:340}," calcext:value-type="string">
            <text:p>{"id":"4-73","name":"イエローサークル","kana":"いえろーさーくる","traitText":null,"ruleText":"自分がイジン召喚する際、そのイジンのレベルは3だけ下がる。¶イジンが自分の戦場に置かれたとき、これを裏にする。","legacyText":"手札に戻す","imageUrl":"https://one-draw.jp/ijinden/cardlist/004/card/04_073.png","expansion":45,"rarity":1,"type":4,"level":0,"color":8,"term":0,"trait":0,"legacy":5,"orderTable":382,"orderDeck":340},</text:p>
          </table:table-cell>
          <table:table-cell table:number-columns-repeated="16347"/>
        </table:table-row>
        <table:table-row table:style-name="ro2">
          <table:table-cell office:value-type="float" office:value="383" calcext:value-type="float">
            <text:p>383</text:p>
          </table:table-cell>
          <table:table-cell office:value-type="float" office:value="371" calcext:value-type="float">
            <text:p>371</text:p>
          </table:table-cell>
          <table:table-cell office:value-type="string" calcext:value-type="string">
            <text:p>4-74</text:p>
          </table:table-cell>
          <table:table-cell office:value-type="float" office:value="74" calcext:value-type="float">
            <text:p>74</text:p>
          </table:table-cell>
          <table:table-cell office:value-type="string" calcext:value-type="string">
            <text:p>ディ・クローネ</text:p>
          </table:table-cell>
          <table:table-cell office:value-type="string" calcext:value-type="string">
            <text:p>でぃくろーね</text:p>
          </table:table-cell>
          <table:table-cell office:value-type="string" calcext:value-type="string">
            <text:p>第４弾ブースターパック</text:p>
          </table:table-cell>
          <table:table-cell table:formula="of:=VLOOKUP([.G383];[$収録番号.$A$1:$収録番号.$B$9];2;0)" office:value-type="float" office:value="45" calcext:value-type="float">
            <text:p>45</text:p>
          </table:table-cell>
          <table:table-cell office:value-type="string" calcext:value-type="string">
            <text:p>N</text:p>
          </table:table-cell>
          <table:table-cell table:formula="of:=VLOOKUP([.I383];[$レアリティ番号.$A$1:$レアリティ番号.$B$4];2;0)" office:value-type="float" office:value="1" calcext:value-type="float">
            <text:p>1</text:p>
          </table:table-cell>
          <table:table-cell office:value-type="string" calcext:value-type="string">
            <text:p>マリョク</text:p>
          </table:table-cell>
          <table:table-cell table:formula="of:=VLOOKUP([.K383];[$種類番号.$A$1:$種類番号.$B$4];2;0)" office:value-type="float" office:value="4" calcext:value-type="float">
            <text:p>4</text:p>
          </table:table-cell>
          <table:table-cell office:value-type="string" calcext:value-type="string">
            <text:p>紫</text:p>
          </table:table-cell>
          <table:table-cell table:formula="of:=VLOOKUP([.M383];[$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8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83];[$特性番号.$A$1:$特性番号.$B$8];2;0);0)" office:value-type="float" office:value="0" calcext:value-type="float">
            <text:p>0</text:p>
          </table:table-cell>
          <table:table-cell office:value-type="string" calcext:value-type="string">
            <text:p>魔力ゾーンに置かれたとき、戦場のパワー1000以下のイジン1体を指定して発動できる。そのイジンを山札の下に戻す。自分は、このターンに限り「バトルできない」を得る。</text:p>
          </table:table-cell>
          <table:table-cell table:style-name="ce8" office:value-type="string" calcext:value-type="string">
            <text:p>復元</text:p>
          </table:table-cell>
          <table:table-cell table:formula="of:=IFERROR(VLOOKUP([.$V383];[$遺業能力番号.$A$1:$遺業能力番号.$B$9];2;0);0)" office:value-type="float" office:value="3" calcext:value-type="float">
            <text:p>3</text:p>
          </table:table-cell>
          <table:table-cell office:value-type="string" calcext:value-type="string">
            <text:p>https://one-draw.jp/ijinden/cardlist/004/card/04_074.png</text:p>
          </table:table-cell>
          <table:table-cell table:formula="of:=CONCATENATE([$JSON.$A$1];[.$C383];[$JSON.$B$1];[.$E383];[$JSON.$C$1];[.$F383];[$JSON.$D$1];IF(ISNA([.$S383]);&quot;null&quot;;&quot;&quot;&quot;&quot;&amp;[.$S383]&amp;&quot;&quot;&quot;&quot;);[$JSON.$E$1];[.$U383];[$JSON.$F$1];IF(ISNA([.$V383]);&quot;null&quot;;&quot;&quot;&quot;&quot;&amp;[.$V383]&amp;&quot;&quot;&quot;&quot;);[$JSON.$G$1];[.$X383];[$JSON.$H$1];[.$H383];[$JSON.$I$1];[.J383];[$JSON.$J$1];[.$L383];[$JSON.$K$1];[.$O383];[$JSON.$L$1];[.$N383];[$JSON.$M$1];[.$R383];[$JSON.$N$1];[.$T383];[$JSON.$O$1];[.$W383];[$JSON.$P$1];[.$A383];[$JSON.$Q$1];[.$B383];[$JSON.$R$1])" office:value-type="string" office:string-value="{&quot;id&quot;:&quot;4-74&quot;,&quot;name&quot;:&quot;ディ・クローネ&quot;,&quot;kana&quot;:&quot;でぃくろーね&quot;,&quot;traitText&quot;:null,&quot;ruleText&quot;:&quot;魔力ゾーンに置かれたとき、戦場のパワー1000以下のイジン1体を指定して発動できる。そのイジンを山札の下に戻す。自分は、このターンに限り「バトルできない」を得る。&quot;,&quot;legacyText&quot;:&quot;復元&quot;,&quot;imageUrl&quot;:&quot;https://one-draw.jp/ijinden/cardlist/004/card/04_074.png&quot;,&quot;expansion&quot;:45,&quot;rarity&quot;:1,&quot;type&quot;:4,&quot;level&quot;:1,&quot;color&quot;:16,&quot;term&quot;:0,&quot;trait&quot;:0,&quot;legacy&quot;:3,&quot;orderTable&quot;:383,&quot;orderDeck&quot;:371}," calcext:value-type="string">
            <text:p>{"id":"4-74","name":"ディ・クローネ","kana":"でぃくろーね","traitText":null,"ruleText":"魔力ゾーンに置かれたとき、戦場のパワー1000以下のイジン1体を指定して発動できる。そのイジンを山札の下に戻す。自分は、このターンに限り「バトルできない」を得る。","legacyText":"復元","imageUrl":"https://one-draw.jp/ijinden/cardlist/004/card/04_074.png","expansion":45,"rarity":1,"type":4,"level":1,"color":16,"term":0,"trait":0,"legacy":3,"orderTable":383,"orderDeck":371},</text:p>
          </table:table-cell>
          <table:table-cell table:number-columns-repeated="16347"/>
        </table:table-row>
        <table:table-row table:style-name="ro2">
          <table:table-cell office:value-type="float" office:value="384" calcext:value-type="float">
            <text:p>384</text:p>
          </table:table-cell>
          <table:table-cell office:value-type="float" office:value="341" calcext:value-type="float">
            <text:p>341</text:p>
          </table:table-cell>
          <table:table-cell office:value-type="string" calcext:value-type="string">
            <text:p>4-75</text:p>
          </table:table-cell>
          <table:table-cell office:value-type="float" office:value="75" calcext:value-type="float">
            <text:p>75</text:p>
          </table:table-cell>
          <table:table-cell office:value-type="string" calcext:value-type="string">
            <text:p>パープルサークル</text:p>
          </table:table-cell>
          <table:table-cell office:value-type="string" calcext:value-type="string">
            <text:p>ぱーぷるさーくる</text:p>
          </table:table-cell>
          <table:table-cell office:value-type="string" calcext:value-type="string">
            <text:p>第４弾ブースターパック</text:p>
          </table:table-cell>
          <table:table-cell table:formula="of:=VLOOKUP([.G384];[$収録番号.$A$1:$収録番号.$B$9];2;0)" office:value-type="float" office:value="45" calcext:value-type="float">
            <text:p>45</text:p>
          </table:table-cell>
          <table:table-cell office:value-type="string" calcext:value-type="string">
            <text:p>N</text:p>
          </table:table-cell>
          <table:table-cell table:formula="of:=VLOOKUP([.I384];[$レアリティ番号.$A$1:$レアリティ番号.$B$4];2;0)" office:value-type="float" office:value="1" calcext:value-type="float">
            <text:p>1</text:p>
          </table:table-cell>
          <table:table-cell office:value-type="string" calcext:value-type="string">
            <text:p>マリョク</text:p>
          </table:table-cell>
          <table:table-cell table:formula="of:=VLOOKUP([.K384];[$種類番号.$A$1:$種類番号.$B$4];2;0)" office:value-type="float" office:value="4" calcext:value-type="float">
            <text:p>4</text:p>
          </table:table-cell>
          <table:table-cell office:value-type="string" calcext:value-type="string">
            <text:p>紫</text:p>
          </table:table-cell>
          <table:table-cell table:formula="of:=VLOOKUP([.M384];[$色番号.$A$1:$色番号.$B$10];2;0)" office:value-type="float" office:value="16" calcext:value-type="float">
            <text:p>16</text:p>
          </table:table-cell>
          <table:table-cell office:value-type="float" office:value="0" calcext:value-type="float">
            <text:p>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8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84];[$特性番号.$A$1:$特性番号.$B$8];2;0);0)" office:value-type="float" office:value="0" calcext:value-type="float">
            <text:p>0</text:p>
          </table:table-cell>
          <table:table-cell office:value-type="string" calcext:value-type="string">
            <text:p>自分がイジン召喚する際、そのイジンのレベルは3だけ下がる。¶イジンが自分の戦場に置かれたとき、これを裏にする。</text:p>
          </table:table-cell>
          <table:table-cell table:style-name="ce8" office:value-type="string" calcext:value-type="string">
            <text:p>手札に戻す</text:p>
          </table:table-cell>
          <table:table-cell table:formula="of:=IFERROR(VLOOKUP([.$V384];[$遺業能力番号.$A$1:$遺業能力番号.$B$9];2;0);0)" office:value-type="float" office:value="5" calcext:value-type="float">
            <text:p>5</text:p>
          </table:table-cell>
          <table:table-cell office:value-type="string" calcext:value-type="string">
            <text:p>https://one-draw.jp/ijinden/cardlist/004/card/04_075.png</text:p>
          </table:table-cell>
          <table:table-cell table:formula="of:=CONCATENATE([$JSON.$A$1];[.$C384];[$JSON.$B$1];[.$E384];[$JSON.$C$1];[.$F384];[$JSON.$D$1];IF(ISNA([.$S384]);&quot;null&quot;;&quot;&quot;&quot;&quot;&amp;[.$S384]&amp;&quot;&quot;&quot;&quot;);[$JSON.$E$1];[.$U384];[$JSON.$F$1];IF(ISNA([.$V384]);&quot;null&quot;;&quot;&quot;&quot;&quot;&amp;[.$V384]&amp;&quot;&quot;&quot;&quot;);[$JSON.$G$1];[.$X384];[$JSON.$H$1];[.$H384];[$JSON.$I$1];[.J384];[$JSON.$J$1];[.$L384];[$JSON.$K$1];[.$O384];[$JSON.$L$1];[.$N384];[$JSON.$M$1];[.$R384];[$JSON.$N$1];[.$T384];[$JSON.$O$1];[.$W384];[$JSON.$P$1];[.$A384];[$JSON.$Q$1];[.$B384];[$JSON.$R$1])" office:value-type="string" office:string-value="{&quot;id&quot;:&quot;4-75&quot;,&quot;name&quot;:&quot;パープルサークル&quot;,&quot;kana&quot;:&quot;ぱーぷるさーくる&quot;,&quot;traitText&quot;:null,&quot;ruleText&quot;:&quot;自分がイジン召喚する際、そのイジンのレベルは3だけ下がる。¶イジンが自分の戦場に置かれたとき、これを裏にする。&quot;,&quot;legacyText&quot;:&quot;手札に戻す&quot;,&quot;imageUrl&quot;:&quot;https://one-draw.jp/ijinden/cardlist/004/card/04_075.png&quot;,&quot;expansion&quot;:45,&quot;rarity&quot;:1,&quot;type&quot;:4,&quot;level&quot;:0,&quot;color&quot;:16,&quot;term&quot;:0,&quot;trait&quot;:0,&quot;legacy&quot;:5,&quot;orderTable&quot;:384,&quot;orderDeck&quot;:341}," calcext:value-type="string">
            <text:p>{"id":"4-75","name":"パープルサークル","kana":"ぱーぷるさーくる","traitText":null,"ruleText":"自分がイジン召喚する際、そのイジンのレベルは3だけ下がる。¶イジンが自分の戦場に置かれたとき、これを裏にする。","legacyText":"手札に戻す","imageUrl":"https://one-draw.jp/ijinden/cardlist/004/card/04_075.png","expansion":45,"rarity":1,"type":4,"level":0,"color":16,"term":0,"trait":0,"legacy":5,"orderTable":384,"orderDeck":341},</text:p>
          </table:table-cell>
          <table:table-cell table:number-columns-repeated="16347"/>
        </table:table-row>
        <table:table-row table:style-name="ro2">
          <table:table-cell office:value-type="float" office:value="385" calcext:value-type="float">
            <text:p>385</text:p>
          </table:table-cell>
          <table:table-cell office:value-type="float" office:value="377" calcext:value-type="float">
            <text:p>377</text:p>
          </table:table-cell>
          <table:table-cell office:value-type="string" calcext:value-type="string">
            <text:p>4-76</text:p>
          </table:table-cell>
          <table:table-cell office:value-type="float" office:value="76" calcext:value-type="float">
            <text:p>76</text:p>
          </table:table-cell>
          <table:table-cell office:value-type="string" calcext:value-type="string">
            <text:p>トランスポーター</text:p>
          </table:table-cell>
          <table:table-cell office:value-type="string" calcext:value-type="string">
            <text:p>とらんすぽーたー</text:p>
          </table:table-cell>
          <table:table-cell office:value-type="string" calcext:value-type="string">
            <text:p>第４弾ブースターパック</text:p>
          </table:table-cell>
          <table:table-cell table:formula="of:=VLOOKUP([.G385];[$収録番号.$A$1:$収録番号.$B$9];2;0)" office:value-type="float" office:value="45" calcext:value-type="float">
            <text:p>45</text:p>
          </table:table-cell>
          <table:table-cell office:value-type="string" calcext:value-type="string">
            <text:p>N</text:p>
          </table:table-cell>
          <table:table-cell table:formula="of:=VLOOKUP([.I385];[$レアリティ番号.$A$1:$レアリティ番号.$B$4];2;0)" office:value-type="float" office:value="1" calcext:value-type="float">
            <text:p>1</text:p>
          </table:table-cell>
          <table:table-cell office:value-type="string" calcext:value-type="string">
            <text:p>マリョク</text:p>
          </table:table-cell>
          <table:table-cell table:formula="of:=VLOOKUP([.K385];[$種類番号.$A$1:$種類番号.$B$4];2;0)" office:value-type="float" office:value="4" calcext:value-type="float">
            <text:p>4</text:p>
          </table:table-cell>
          <table:table-cell office:value-type="string" calcext:value-type="string">
            <text:p>無色</text:p>
          </table:table-cell>
          <table:table-cell table:formula="of:=VLOOKUP([.M385];[$色番号.$A$1:$色番号.$B$10];2;0)" office:value-type="float" office:value="64" calcext:value-type="float">
            <text:p>6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8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85];[$特性番号.$A$1:$特性番号.$B$8];2;0);0)" office:value-type="float" office:value="0" calcext:value-type="float">
            <text:p>0</text:p>
          </table:table-cell>
          <table:table-cell office:value-type="string" calcext:value-type="string">
            <text:p>魔力ゾーンに置かれたとき、以下から1つを発動する。¶・自分の手札のレベル2以下のイジン1体を指定して発動できる。そのイジンを戦場に置く。¶・1ドローする。</text:p>
          </table:table-cell>
          <table:table-cell table:style-name="ce8" office:value-type="string" calcext:value-type="string">
            <text:p>1ドローする</text:p>
          </table:table-cell>
          <table:table-cell table:formula="of:=IFERROR(VLOOKUP([.$V385];[$遺業能力番号.$A$1:$遺業能力番号.$B$9];2;0);0)" office:value-type="float" office:value="4" calcext:value-type="float">
            <text:p>4</text:p>
          </table:table-cell>
          <table:table-cell office:value-type="string" calcext:value-type="string">
            <text:p>https://one-draw.jp/ijinden/cardlist/004/card/04_076.png</text:p>
          </table:table-cell>
          <table:table-cell table:formula="of:=CONCATENATE([$JSON.$A$1];[.$C385];[$JSON.$B$1];[.$E385];[$JSON.$C$1];[.$F385];[$JSON.$D$1];IF(ISNA([.$S385]);&quot;null&quot;;&quot;&quot;&quot;&quot;&amp;[.$S385]&amp;&quot;&quot;&quot;&quot;);[$JSON.$E$1];[.$U385];[$JSON.$F$1];IF(ISNA([.$V385]);&quot;null&quot;;&quot;&quot;&quot;&quot;&amp;[.$V385]&amp;&quot;&quot;&quot;&quot;);[$JSON.$G$1];[.$X385];[$JSON.$H$1];[.$H385];[$JSON.$I$1];[.J385];[$JSON.$J$1];[.$L385];[$JSON.$K$1];[.$O385];[$JSON.$L$1];[.$N385];[$JSON.$M$1];[.$R385];[$JSON.$N$1];[.$T385];[$JSON.$O$1];[.$W385];[$JSON.$P$1];[.$A385];[$JSON.$Q$1];[.$B385];[$JSON.$R$1])" office:value-type="string" office:string-value="{&quot;id&quot;:&quot;4-76&quot;,&quot;name&quot;:&quot;トランスポーター&quot;,&quot;kana&quot;:&quot;とらんすぽーたー&quot;,&quot;traitText&quot;:null,&quot;ruleText&quot;:&quot;魔力ゾーンに置かれたとき、以下から1つを発動する。¶・自分の手札のレベル2以下のイジン1体を指定して発動できる。そのイジンを戦場に置く。¶・1ドローする。&quot;,&quot;legacyText&quot;:&quot;1ドローする&quot;,&quot;imageUrl&quot;:&quot;https://one-draw.jp/ijinden/cardlist/004/card/04_076.png&quot;,&quot;expansion&quot;:45,&quot;rarity&quot;:1,&quot;type&quot;:4,&quot;level&quot;:1,&quot;color&quot;:64,&quot;term&quot;:0,&quot;trait&quot;:0,&quot;legacy&quot;:4,&quot;orderTable&quot;:385,&quot;orderDeck&quot;:377}," calcext:value-type="string">
            <text:p>{"id":"4-76","name":"トランスポーター","kana":"とらんすぽーたー","traitText":null,"ruleText":"魔力ゾーンに置かれたとき、以下から1つを発動する。¶・自分の手札のレベル2以下のイジン1体を指定して発動できる。そのイジンを戦場に置く。¶・1ドローする。","legacyText":"1ドローする","imageUrl":"https://one-draw.jp/ijinden/cardlist/004/card/04_076.png","expansion":45,"rarity":1,"type":4,"level":1,"color":64,"term":0,"trait":0,"legacy":4,"orderTable":385,"orderDeck":377},</text:p>
          </table:table-cell>
          <table:table-cell table:number-columns-repeated="16347"/>
        </table:table-row>
        <table:table-row table:style-name="ro2">
          <table:table-cell office:value-type="float" office:value="386" calcext:value-type="float">
            <text:p>386</text:p>
          </table:table-cell>
          <table:table-cell office:value-type="float" office:value="387" calcext:value-type="float">
            <text:p>387</text:p>
          </table:table-cell>
          <table:table-cell office:value-type="string" calcext:value-type="string">
            <text:p>4-77</text:p>
          </table:table-cell>
          <table:table-cell office:value-type="float" office:value="77" calcext:value-type="float">
            <text:p>77</text:p>
          </table:table-cell>
          <table:table-cell office:value-type="string" calcext:value-type="string">
            <text:p>アセイミー</text:p>
          </table:table-cell>
          <table:table-cell office:value-type="string" calcext:value-type="string">
            <text:p>あせいみー</text:p>
          </table:table-cell>
          <table:table-cell office:value-type="string" calcext:value-type="string">
            <text:p>第４弾ブースターパック</text:p>
          </table:table-cell>
          <table:table-cell table:formula="of:=VLOOKUP([.G386];[$収録番号.$A$1:$収録番号.$B$9];2;0)" office:value-type="float" office:value="45" calcext:value-type="float">
            <text:p>45</text:p>
          </table:table-cell>
          <table:table-cell office:value-type="string" calcext:value-type="string">
            <text:p>R</text:p>
          </table:table-cell>
          <table:table-cell table:formula="of:=VLOOKUP([.I386];[$レアリティ番号.$A$1:$レアリティ番号.$B$4];2;0)" office:value-type="float" office:value="2" calcext:value-type="float">
            <text:p>2</text:p>
          </table:table-cell>
          <table:table-cell office:value-type="string" calcext:value-type="string">
            <text:p>マリョク</text:p>
          </table:table-cell>
          <table:table-cell table:formula="of:=VLOOKUP([.K386];[$種類番号.$A$1:$種類番号.$B$4];2;0)" office:value-type="float" office:value="4" calcext:value-type="float">
            <text:p>4</text:p>
          </table:table-cell>
          <table:table-cell office:value-type="string" calcext:value-type="string">
            <text:p>無色</text:p>
          </table:table-cell>
          <table:table-cell table:formula="of:=VLOOKUP([.M386];[$色番号.$A$1:$色番号.$B$10];2;0)" office:value-type="float" office:value="64" calcext:value-type="float">
            <text:p>6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8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86];[$特性番号.$A$1:$特性番号.$B$8];2;0);0)" office:value-type="float" office:value="0" calcext:value-type="float">
            <text:p>0</text:p>
          </table:table-cell>
          <table:table-cell office:value-type="string" calcext:value-type="string">
            <text:p>魔力ゾーンに置かれたとき、自分の魔力ゾーンの裏のカードで、表が『サークル』マリョクのもの1つ以上を指定して発動できる。それらのカードすべてを表にする。</text:p>
          </table:table-cell>
          <table:table-cell table:style-name="ce8" office:value-type="string" calcext:value-type="string">
            <text:p>復元</text:p>
          </table:table-cell>
          <table:table-cell table:formula="of:=IFERROR(VLOOKUP([.$V386];[$遺業能力番号.$A$1:$遺業能力番号.$B$9];2;0);0)" office:value-type="float" office:value="3" calcext:value-type="float">
            <text:p>3</text:p>
          </table:table-cell>
          <table:table-cell office:value-type="string" calcext:value-type="string">
            <text:p>https://one-draw.jp/ijinden/cardlist/004/card/04_077.png</text:p>
          </table:table-cell>
          <table:table-cell table:formula="of:=CONCATENATE([$JSON.$A$1];[.$C386];[$JSON.$B$1];[.$E386];[$JSON.$C$1];[.$F386];[$JSON.$D$1];IF(ISNA([.$S386]);&quot;null&quot;;&quot;&quot;&quot;&quot;&amp;[.$S386]&amp;&quot;&quot;&quot;&quot;);[$JSON.$E$1];[.$U386];[$JSON.$F$1];IF(ISNA([.$V386]);&quot;null&quot;;&quot;&quot;&quot;&quot;&amp;[.$V386]&amp;&quot;&quot;&quot;&quot;);[$JSON.$G$1];[.$X386];[$JSON.$H$1];[.$H386];[$JSON.$I$1];[.J386];[$JSON.$J$1];[.$L386];[$JSON.$K$1];[.$O386];[$JSON.$L$1];[.$N386];[$JSON.$M$1];[.$R386];[$JSON.$N$1];[.$T386];[$JSON.$O$1];[.$W386];[$JSON.$P$1];[.$A386];[$JSON.$Q$1];[.$B386];[$JSON.$R$1])" office:value-type="string" office:string-value="{&quot;id&quot;:&quot;4-77&quot;,&quot;name&quot;:&quot;アセイミー&quot;,&quot;kana&quot;:&quot;あせいみー&quot;,&quot;traitText&quot;:null,&quot;ruleText&quot;:&quot;魔力ゾーンに置かれたとき、自分の魔力ゾーンの裏のカードで、表が『サークル』マリョクのもの1つ以上を指定して発動できる。それらのカードすべてを表にする。&quot;,&quot;legacyText&quot;:&quot;復元&quot;,&quot;imageUrl&quot;:&quot;https://one-draw.jp/ijinden/cardlist/004/card/04_077.png&quot;,&quot;expansion&quot;:45,&quot;rarity&quot;:2,&quot;type&quot;:4,&quot;level&quot;:2,&quot;color&quot;:64,&quot;term&quot;:0,&quot;trait&quot;:0,&quot;legacy&quot;:3,&quot;orderTable&quot;:386,&quot;orderDeck&quot;:387}," calcext:value-type="string">
            <text:p>{"id":"4-77","name":"アセイミー","kana":"あせいみー","traitText":null,"ruleText":"魔力ゾーンに置かれたとき、自分の魔力ゾーンの裏のカードで、表が『サークル』マリョクのもの1つ以上を指定して発動できる。それらのカードすべてを表にする。","legacyText":"復元","imageUrl":"https://one-draw.jp/ijinden/cardlist/004/card/04_077.png","expansion":45,"rarity":2,"type":4,"level":2,"color":64,"term":0,"trait":0,"legacy":3,"orderTable":386,"orderDeck":387},</text:p>
          </table:table-cell>
          <table:table-cell table:number-columns-repeated="16347"/>
        </table:table-row>
        <table:table-row table:style-name="ro2">
          <table:table-cell office:value-type="float" office:value="387" calcext:value-type="float">
            <text:p>387</text:p>
          </table:table-cell>
          <table:table-cell office:value-type="float" office:value="388" calcext:value-type="float">
            <text:p>388</text:p>
          </table:table-cell>
          <table:table-cell office:value-type="string" calcext:value-type="string">
            <text:p>4-78</text:p>
          </table:table-cell>
          <table:table-cell office:value-type="float" office:value="78" calcext:value-type="float">
            <text:p>78</text:p>
          </table:table-cell>
          <table:table-cell office:value-type="string" calcext:value-type="string">
            <text:p>ホプロン</text:p>
          </table:table-cell>
          <table:table-cell office:value-type="string" calcext:value-type="string">
            <text:p>ほぷろん</text:p>
          </table:table-cell>
          <table:table-cell office:value-type="string" calcext:value-type="string">
            <text:p>第４弾ブースターパック</text:p>
          </table:table-cell>
          <table:table-cell table:formula="of:=VLOOKUP([.G387];[$収録番号.$A$1:$収録番号.$B$9];2;0)" office:value-type="float" office:value="45" calcext:value-type="float">
            <text:p>45</text:p>
          </table:table-cell>
          <table:table-cell office:value-type="string" calcext:value-type="string">
            <text:p>N</text:p>
          </table:table-cell>
          <table:table-cell table:formula="of:=VLOOKUP([.I387];[$レアリティ番号.$A$1:$レアリティ番号.$B$4];2;0)" office:value-type="float" office:value="1" calcext:value-type="float">
            <text:p>1</text:p>
          </table:table-cell>
          <table:table-cell office:value-type="string" calcext:value-type="string">
            <text:p>マリョク</text:p>
          </table:table-cell>
          <table:table-cell table:formula="of:=VLOOKUP([.K387];[$種類番号.$A$1:$種類番号.$B$4];2;0)" office:value-type="float" office:value="4" calcext:value-type="float">
            <text:p>4</text:p>
          </table:table-cell>
          <table:table-cell office:value-type="string" calcext:value-type="string">
            <text:p>無色</text:p>
          </table:table-cell>
          <table:table-cell table:formula="of:=VLOOKUP([.M387];[$色番号.$A$1:$色番号.$B$10];2;0)" office:value-type="float" office:value="64" calcext:value-type="float">
            <text:p>6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8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87];[$特性番号.$A$1:$特性番号.$B$8];2;0);0)" office:value-type="float" office:value="0" calcext:value-type="float">
            <text:p>0</text:p>
          </table:table-cell>
          <table:table-cell office:value-type="string" calcext:value-type="string">
            <text:p>イジン召喚によってイジンが自分の戦場に置かれる際、そのイジンに装備させてもよい。¶装備 : バトルの間、自分の戦場のイジンは、相手の能力によって破壊されず、相手の能力によって戦場を離れない。</text:p>
          </table:table-cell>
          <table:table-cell table:style-name="ce8" office:value-type="string" calcext:value-type="string">
            <text:p>復元</text:p>
          </table:table-cell>
          <table:table-cell table:formula="of:=IFERROR(VLOOKUP([.$V387];[$遺業能力番号.$A$1:$遺業能力番号.$B$9];2;0);0)" office:value-type="float" office:value="3" calcext:value-type="float">
            <text:p>3</text:p>
          </table:table-cell>
          <table:table-cell office:value-type="string" calcext:value-type="string">
            <text:p>https://one-draw.jp/ijinden/cardlist/004/card/04_078.png</text:p>
          </table:table-cell>
          <table:table-cell table:formula="of:=CONCATENATE([$JSON.$A$1];[.$C387];[$JSON.$B$1];[.$E387];[$JSON.$C$1];[.$F387];[$JSON.$D$1];IF(ISNA([.$S387]);&quot;null&quot;;&quot;&quot;&quot;&quot;&amp;[.$S387]&amp;&quot;&quot;&quot;&quot;);[$JSON.$E$1];[.$U387];[$JSON.$F$1];IF(ISNA([.$V387]);&quot;null&quot;;&quot;&quot;&quot;&quot;&amp;[.$V387]&amp;&quot;&quot;&quot;&quot;);[$JSON.$G$1];[.$X387];[$JSON.$H$1];[.$H387];[$JSON.$I$1];[.J387];[$JSON.$J$1];[.$L387];[$JSON.$K$1];[.$O387];[$JSON.$L$1];[.$N387];[$JSON.$M$1];[.$R387];[$JSON.$N$1];[.$T387];[$JSON.$O$1];[.$W387];[$JSON.$P$1];[.$A387];[$JSON.$Q$1];[.$B387];[$JSON.$R$1])" office:value-type="string" office:string-value="{&quot;id&quot;:&quot;4-78&quot;,&quot;name&quot;:&quot;ホプロン&quot;,&quot;kana&quot;:&quot;ほぷろん&quot;,&quot;traitText&quot;:null,&quot;ruleText&quot;:&quot;イジン召喚によってイジンが自分の戦場に置かれる際、そのイジンに装備させてもよい。¶装備 : バトルの間、自分の戦場のイジンは、相手の能力によって破壊されず、相手の能力によって戦場を離れない。&quot;,&quot;legacyText&quot;:&quot;復元&quot;,&quot;imageUrl&quot;:&quot;https://one-draw.jp/ijinden/cardlist/004/card/04_078.png&quot;,&quot;expansion&quot;:45,&quot;rarity&quot;:1,&quot;type&quot;:4,&quot;level&quot;:2,&quot;color&quot;:64,&quot;term&quot;:0,&quot;trait&quot;:0,&quot;legacy&quot;:3,&quot;orderTable&quot;:387,&quot;orderDeck&quot;:388}," calcext:value-type="string">
            <text:p>{"id":"4-78","name":"ホプロン","kana":"ほぷろん","traitText":null,"ruleText":"イジン召喚によってイジンが自分の戦場に置かれる際、そのイジンに装備させてもよい。¶装備 : バトルの間、自分の戦場のイジンは、相手の能力によって破壊されず、相手の能力によって戦場を離れない。","legacyText":"復元","imageUrl":"https://one-draw.jp/ijinden/cardlist/004/card/04_078.png","expansion":45,"rarity":1,"type":4,"level":2,"color":64,"term":0,"trait":0,"legacy":3,"orderTable":387,"orderDeck":388},</text:p>
          </table:table-cell>
          <table:table-cell table:number-columns-repeated="16347"/>
        </table:table-row>
        <table:table-row table:style-name="ro2">
          <table:table-cell office:value-type="float" office:value="388" calcext:value-type="float">
            <text:p>388</text:p>
          </table:table-cell>
          <table:table-cell office:value-type="float" office:value="378" calcext:value-type="float">
            <text:p>378</text:p>
          </table:table-cell>
          <table:table-cell office:value-type="string" calcext:value-type="string">
            <text:p>4-79</text:p>
          </table:table-cell>
          <table:table-cell office:value-type="float" office:value="79" calcext:value-type="float">
            <text:p>79</text:p>
          </table:table-cell>
          <table:table-cell office:value-type="string" calcext:value-type="string">
            <text:p>ピクシーダスト</text:p>
          </table:table-cell>
          <table:table-cell office:value-type="string" calcext:value-type="string">
            <text:p>ぴくしーだすと</text:p>
          </table:table-cell>
          <table:table-cell office:value-type="string" calcext:value-type="string">
            <text:p>第４弾ブースターパック</text:p>
          </table:table-cell>
          <table:table-cell table:formula="of:=VLOOKUP([.G388];[$収録番号.$A$1:$収録番号.$B$9];2;0)" office:value-type="float" office:value="45" calcext:value-type="float">
            <text:p>45</text:p>
          </table:table-cell>
          <table:table-cell office:value-type="string" calcext:value-type="string">
            <text:p>N</text:p>
          </table:table-cell>
          <table:table-cell table:formula="of:=VLOOKUP([.I388];[$レアリティ番号.$A$1:$レアリティ番号.$B$4];2;0)" office:value-type="float" office:value="1" calcext:value-type="float">
            <text:p>1</text:p>
          </table:table-cell>
          <table:table-cell office:value-type="string" calcext:value-type="string">
            <text:p>マリョク</text:p>
          </table:table-cell>
          <table:table-cell table:formula="of:=VLOOKUP([.K388];[$種類番号.$A$1:$種類番号.$B$4];2;0)" office:value-type="float" office:value="4" calcext:value-type="float">
            <text:p>4</text:p>
          </table:table-cell>
          <table:table-cell office:value-type="string" calcext:value-type="string">
            <text:p>無色</text:p>
          </table:table-cell>
          <table:table-cell table:formula="of:=VLOOKUP([.M388];[$色番号.$A$1:$色番号.$B$10];2;0)" office:value-type="float" office:value="64" calcext:value-type="float">
            <text:p>6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8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88];[$特性番号.$A$1:$特性番号.$B$8];2;0);0)" office:value-type="float" office:value="0" calcext:value-type="float">
            <text:p>0</text:p>
          </table:table-cell>
          <table:table-cell office:value-type="string" calcext:value-type="string">
            <text:p>この能力は、自分の魔力ゾーンのカードが、相手の魔力ゾーンのカードより多いなら発動しない。魔力ゾーンに置かれたとき、自分の手札か自分の墓地のマリョク1つを指定して発動できる。そのマリョクを魔力ゾーンに置く。</text:p>
          </table:table-cell>
          <table:table-cell table:style-name="ce8" office:value-type="string" calcext:value-type="string">
            <text:p>魔力化</text:p>
          </table:table-cell>
          <table:table-cell table:formula="of:=IFERROR(VLOOKUP([.$V388];[$遺業能力番号.$A$1:$遺業能力番号.$B$9];2;0);0)" office:value-type="float" office:value="1" calcext:value-type="float">
            <text:p>1</text:p>
          </table:table-cell>
          <table:table-cell office:value-type="string" calcext:value-type="string">
            <text:p>https://one-draw.jp/ijinden/cardlist/004/card/04_079.png</text:p>
          </table:table-cell>
          <table:table-cell table:formula="of:=CONCATENATE([$JSON.$A$1];[.$C388];[$JSON.$B$1];[.$E388];[$JSON.$C$1];[.$F388];[$JSON.$D$1];IF(ISNA([.$S388]);&quot;null&quot;;&quot;&quot;&quot;&quot;&amp;[.$S388]&amp;&quot;&quot;&quot;&quot;);[$JSON.$E$1];[.$U388];[$JSON.$F$1];IF(ISNA([.$V388]);&quot;null&quot;;&quot;&quot;&quot;&quot;&amp;[.$V388]&amp;&quot;&quot;&quot;&quot;);[$JSON.$G$1];[.$X388];[$JSON.$H$1];[.$H388];[$JSON.$I$1];[.J388];[$JSON.$J$1];[.$L388];[$JSON.$K$1];[.$O388];[$JSON.$L$1];[.$N388];[$JSON.$M$1];[.$R388];[$JSON.$N$1];[.$T388];[$JSON.$O$1];[.$W388];[$JSON.$P$1];[.$A388];[$JSON.$Q$1];[.$B388];[$JSON.$R$1])" office:value-type="string" office:string-value="{&quot;id&quot;:&quot;4-79&quot;,&quot;name&quot;:&quot;ピクシーダスト&quot;,&quot;kana&quot;:&quot;ぴくしーだすと&quot;,&quot;traitText&quot;:null,&quot;ruleText&quot;:&quot;この能力は、自分の魔力ゾーンのカードが、相手の魔力ゾーンのカードより多いなら発動しない。魔力ゾーンに置かれたとき、自分の手札か自分の墓地のマリョク1つを指定して発動できる。そのマリョクを魔力ゾーンに置く。&quot;,&quot;legacyText&quot;:&quot;魔力化&quot;,&quot;imageUrl&quot;:&quot;https://one-draw.jp/ijinden/cardlist/004/card/04_079.png&quot;,&quot;expansion&quot;:45,&quot;rarity&quot;:1,&quot;type&quot;:4,&quot;level&quot;:1,&quot;color&quot;:64,&quot;term&quot;:0,&quot;trait&quot;:0,&quot;legacy&quot;:1,&quot;orderTable&quot;:388,&quot;orderDeck&quot;:378}," calcext:value-type="string">
            <text:p>{"id":"4-79","name":"ピクシーダスト","kana":"ぴくしーだすと","traitText":null,"ruleText":"この能力は、自分の魔力ゾーンのカードが、相手の魔力ゾーンのカードより多いなら発動しない。魔力ゾーンに置かれたとき、自分の手札か自分の墓地のマリョク1つを指定して発動できる。そのマリョクを魔力ゾーンに置く。","legacyText":"魔力化","imageUrl":"https://one-draw.jp/ijinden/cardlist/004/card/04_079.png","expansion":45,"rarity":1,"type":4,"level":1,"color":64,"term":0,"trait":0,"legacy":1,"orderTable":388,"orderDeck":378},</text:p>
          </table:table-cell>
          <table:table-cell table:number-columns-repeated="16347"/>
        </table:table-row>
        <table:table-row table:style-name="ro2">
          <table:table-cell table:number-columns-repeated="2" office:value-type="float" office:value="389" calcext:value-type="float">
            <text:p>389</text:p>
          </table:table-cell>
          <table:table-cell office:value-type="string" calcext:value-type="string">
            <text:p>4-80</text:p>
          </table:table-cell>
          <table:table-cell office:value-type="float" office:value="80" calcext:value-type="float">
            <text:p>80</text:p>
          </table:table-cell>
          <table:table-cell office:value-type="string" calcext:value-type="string">
            <text:p>カルドロン</text:p>
          </table:table-cell>
          <table:table-cell office:value-type="string" calcext:value-type="string">
            <text:p>かるどろん</text:p>
          </table:table-cell>
          <table:table-cell office:value-type="string" calcext:value-type="string">
            <text:p>第４弾ブースターパック</text:p>
          </table:table-cell>
          <table:table-cell table:formula="of:=VLOOKUP([.G389];[$収録番号.$A$1:$収録番号.$B$9];2;0)" office:value-type="float" office:value="45" calcext:value-type="float">
            <text:p>45</text:p>
          </table:table-cell>
          <table:table-cell office:value-type="string" calcext:value-type="string">
            <text:p>R</text:p>
          </table:table-cell>
          <table:table-cell table:formula="of:=VLOOKUP([.I389];[$レアリティ番号.$A$1:$レアリティ番号.$B$4];2;0)" office:value-type="float" office:value="2" calcext:value-type="float">
            <text:p>2</text:p>
          </table:table-cell>
          <table:table-cell office:value-type="string" calcext:value-type="string">
            <text:p>マリョク</text:p>
          </table:table-cell>
          <table:table-cell table:formula="of:=VLOOKUP([.K389];[$種類番号.$A$1:$種類番号.$B$4];2;0)" office:value-type="float" office:value="4" calcext:value-type="float">
            <text:p>4</text:p>
          </table:table-cell>
          <table:table-cell office:value-type="string" calcext:value-type="string">
            <text:p>無色</text:p>
          </table:table-cell>
          <table:table-cell table:formula="of:=VLOOKUP([.M389];[$色番号.$A$1:$色番号.$B$10];2;0)" office:value-type="float" office:value="64" calcext:value-type="float">
            <text:p>6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8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89];[$特性番号.$A$1:$特性番号.$B$8];2;0);0)" office:value-type="float" office:value="0" calcext:value-type="float">
            <text:p>0</text:p>
          </table:table-cell>
          <table:table-cell office:value-type="string" calcext:value-type="string">
            <text:p>魔力ゾーンに置かれたとき、自分の手札のカード1つを指定して発動できる。「そのカードを墓地に置く」か「そのカードを裏向きで魔力ゾーンに置く」のどちらかを発揮する。¶これが魔力ゾーンにある間、自分の墓地の色すべてを得る。</text:p>
          </table:table-cell>
          <table:table-cell table:style-name="ce8" office:value-type="string" calcext:value-type="string">
            <text:p>魔力化</text:p>
          </table:table-cell>
          <table:table-cell table:formula="of:=IFERROR(VLOOKUP([.$V389];[$遺業能力番号.$A$1:$遺業能力番号.$B$9];2;0);0)" office:value-type="float" office:value="1" calcext:value-type="float">
            <text:p>1</text:p>
          </table:table-cell>
          <table:table-cell office:value-type="string" calcext:value-type="string">
            <text:p>https://one-draw.jp/ijinden/cardlist/004/card/04_080.png</text:p>
          </table:table-cell>
          <table:table-cell table:formula="of:=CONCATENATE([$JSON.$A$1];[.$C389];[$JSON.$B$1];[.$E389];[$JSON.$C$1];[.$F389];[$JSON.$D$1];IF(ISNA([.$S389]);&quot;null&quot;;&quot;&quot;&quot;&quot;&amp;[.$S389]&amp;&quot;&quot;&quot;&quot;);[$JSON.$E$1];[.$U389];[$JSON.$F$1];IF(ISNA([.$V389]);&quot;null&quot;;&quot;&quot;&quot;&quot;&amp;[.$V389]&amp;&quot;&quot;&quot;&quot;);[$JSON.$G$1];[.$X389];[$JSON.$H$1];[.$H389];[$JSON.$I$1];[.J389];[$JSON.$J$1];[.$L389];[$JSON.$K$1];[.$O389];[$JSON.$L$1];[.$N389];[$JSON.$M$1];[.$R389];[$JSON.$N$1];[.$T389];[$JSON.$O$1];[.$W389];[$JSON.$P$1];[.$A389];[$JSON.$Q$1];[.$B389];[$JSON.$R$1])" office:value-type="string" office:string-value="{&quot;id&quot;:&quot;4-80&quot;,&quot;name&quot;:&quot;カルドロン&quot;,&quot;kana&quot;:&quot;かるどろん&quot;,&quot;traitText&quot;:null,&quot;ruleText&quot;:&quot;魔力ゾーンに置かれたとき、自分の手札のカード1つを指定して発動できる。「そのカードを墓地に置く」か「そのカードを裏向きで魔力ゾーンに置く」のどちらかを発揮する。¶これが魔力ゾーンにある間、自分の墓地の色すべてを得る。&quot;,&quot;legacyText&quot;:&quot;魔力化&quot;,&quot;imageUrl&quot;:&quot;https://one-draw.jp/ijinden/cardlist/004/card/04_080.png&quot;,&quot;expansion&quot;:45,&quot;rarity&quot;:2,&quot;type&quot;:4,&quot;level&quot;:2,&quot;color&quot;:64,&quot;term&quot;:0,&quot;trait&quot;:0,&quot;legacy&quot;:1,&quot;orderTable&quot;:389,&quot;orderDeck&quot;:389}," calcext:value-type="string">
            <text:p>{"id":"4-80","name":"カルドロン","kana":"かるどろん","traitText":null,"ruleText":"魔力ゾーンに置かれたとき、自分の手札のカード1つを指定して発動できる。「そのカードを墓地に置く」か「そのカードを裏向きで魔力ゾーンに置く」のどちらかを発揮する。¶これが魔力ゾーンにある間、自分の墓地の色すべてを得る。","legacyText":"魔力化","imageUrl":"https://one-draw.jp/ijinden/cardlist/004/card/04_080.png","expansion":45,"rarity":2,"type":4,"level":2,"color":64,"term":0,"trait":0,"legacy":1,"orderTable":389,"orderDeck":389},</text:p>
          </table:table-cell>
          <table:table-cell table:number-columns-repeated="16347"/>
        </table:table-row>
        <table:table-row table:style-name="ro2" table:number-rows-repeated="1048186">
          <table:table-cell table:number-columns-repeated="16372"/>
        </table:table-row>
        <table:table-row table:style-name="ro2">
          <table:table-cell table:number-columns-repeated="16372"/>
        </table:table-row>
      </table:table>
      <table:table table:name="収録番号" table:style-name="ta1">
        <table:table-column table:style-name="co6" table:default-cell-style-name="Default"/>
        <table:table-column table:style-name="co3" table:default-cell-style-name="Default"/>
        <table:table-row table:style-name="ro2">
          <table:table-cell office:value-type="string" calcext:value-type="string">
            <text:p>伝説の武将デッキ</text:p>
          </table:table-cell>
          <table:table-cell office:value-type="float" office:value="10" calcext:value-type="float">
            <text:p>10</text:p>
          </table:table-cell>
        </table:table-row>
        <table:table-row table:style-name="ro2">
          <table:table-cell office:value-type="string" calcext:value-type="string">
            <text:p>知と美の革命デッキ</text:p>
          </table:table-cell>
          <table:table-cell office:value-type="float" office:value="11" calcext:value-type="float">
            <text:p>11</text:p>
          </table:table-cell>
        </table:table-row>
        <table:table-row table:style-name="ro2">
          <table:table-cell office:value-type="string" calcext:value-type="string">
            <text:p>日本の大天才デッキ</text:p>
          </table:table-cell>
          <table:table-cell office:value-type="float" office:value="12" calcext:value-type="float">
            <text:p>12</text:p>
          </table:table-cell>
        </table:table-row>
        <table:table-row table:style-name="ro2">
          <table:table-cell office:value-type="string" calcext:value-type="string">
            <text:p>第１弾ブースターパック</text:p>
          </table:table-cell>
          <table:table-cell office:value-type="float" office:value="15" calcext:value-type="float">
            <text:p>15</text:p>
          </table:table-cell>
        </table:table-row>
        <table:table-row table:style-name="ro2">
          <table:table-cell office:value-type="string" calcext:value-type="string">
            <text:p>三国の英傑デッキ</text:p>
          </table:table-cell>
          <table:table-cell office:value-type="float" office:value="20" calcext:value-type="float">
            <text:p>20</text:p>
          </table:table-cell>
        </table:table-row>
        <table:table-row table:style-name="ro2">
          <table:table-cell office:value-type="string" calcext:value-type="string">
            <text:p>第２弾ブースターパック</text:p>
          </table:table-cell>
          <table:table-cell office:value-type="float" office:value="25" calcext:value-type="float">
            <text:p>25</text:p>
          </table:table-cell>
        </table:table-row>
        <table:table-row table:style-name="ro2">
          <table:table-cell office:value-type="string" calcext:value-type="string">
            <text:p>発展する医療デッキ</text:p>
          </table:table-cell>
          <table:table-cell office:value-type="float" office:value="30" calcext:value-type="float">
            <text:p>30</text:p>
          </table:table-cell>
        </table:table-row>
        <table:table-row table:style-name="ro2">
          <table:table-cell office:value-type="string" calcext:value-type="string">
            <text:p>第３弾ブースターパック</text:p>
          </table:table-cell>
          <table:table-cell office:value-type="float" office:value="35" calcext:value-type="float">
            <text:p>35</text:p>
          </table:table-cell>
        </table:table-row>
        <table:table-row table:style-name="ro2">
          <table:table-cell office:value-type="string" calcext:value-type="string">
            <text:p>第４弾ブースターパック</text:p>
          </table:table-cell>
          <table:table-cell office:value-type="float" office:value="45" calcext:value-type="float">
            <text:p>45</text:p>
          </table:table-cell>
        </table:table-row>
      </table:table>
      <table:table table:name="レアリティ番号" table:style-name="ta1">
        <table:table-column table:style-name="co10" table:default-cell-style-name="Default"/>
        <table:table-column table:style-name="co16" table:default-cell-style-name="Default"/>
        <table:table-row table:style-name="ro2">
          <table:table-cell office:value-type="string" calcext:value-type="string">
            <text:p>N</text:p>
          </table:table-cell>
          <table:table-cell office:value-type="float" office:value="1" calcext:value-type="float">
            <text:p>1</text:p>
          </table:table-cell>
        </table:table-row>
        <table:table-row table:style-name="ro2">
          <table:table-cell office:value-type="string" calcext:value-type="string">
            <text:p>R</text:p>
          </table:table-cell>
          <table:table-cell office:value-type="float" office:value="2" calcext:value-type="float">
            <text:p>2</text:p>
          </table:table-cell>
        </table:table-row>
        <table:table-row table:style-name="ro2">
          <table:table-cell office:value-type="string" calcext:value-type="string">
            <text:p>SR</text:p>
          </table:table-cell>
          <table:table-cell office:value-type="float" office:value="4" calcext:value-type="float">
            <text:p>4</text:p>
          </table:table-cell>
        </table:table-row>
        <table:table-row table:style-name="ro2">
          <table:table-cell office:value-type="string" calcext:value-type="string">
            <text:p>PSR</text:p>
          </table:table-cell>
          <table:table-cell office:value-type="float" office:value="8" calcext:value-type="float">
            <text:p>8</text:p>
          </table:table-cell>
        </table:table-row>
      </table:table>
      <table:table table:name="種類番号" table:style-name="ta1">
        <table:table-column table:style-name="co9" table:default-cell-style-name="Default"/>
        <table:table-column table:style-name="co16" table:default-cell-style-name="Default"/>
        <table:table-row table:style-name="ro2">
          <table:table-cell office:value-type="string" calcext:value-type="string">
            <text:p>イジン</text:p>
          </table:table-cell>
          <table:table-cell office:value-type="float" office:value="1" calcext:value-type="float">
            <text:p>1</text:p>
          </table:table-cell>
        </table:table-row>
        <table:table-row table:style-name="ro2">
          <table:table-cell office:value-type="string" calcext:value-type="string">
            <text:p>ハイケイ</text:p>
          </table:table-cell>
          <table:table-cell office:value-type="float" office:value="2" calcext:value-type="float">
            <text:p>2</text:p>
          </table:table-cell>
        </table:table-row>
        <table:table-row table:style-name="ro2">
          <table:table-cell office:value-type="string" calcext:value-type="string">
            <text:p>マホウ</text:p>
          </table:table-cell>
          <table:table-cell office:value-type="float" office:value="3" calcext:value-type="float">
            <text:p>3</text:p>
          </table:table-cell>
        </table:table-row>
        <table:table-row table:style-name="ro2">
          <table:table-cell office:value-type="string" calcext:value-type="string">
            <text:p>マリョク</text:p>
          </table:table-cell>
          <table:table-cell office:value-type="float" office:value="4" calcext:value-type="float">
            <text:p>4</text:p>
          </table:table-cell>
        </table:table-row>
      </table:table>
      <table:table table:name="色番号" table:style-name="ta1">
        <table:table-column table:style-name="co10" table:default-cell-style-name="Default"/>
        <table:table-column table:style-name="co3" table:default-cell-style-name="Default"/>
        <table:table-row table:style-name="ro2">
          <table:table-cell office:value-type="string" calcext:value-type="string">
            <text:p>赤</text:p>
          </table:table-cell>
          <table:table-cell office:value-type="float" office:value="1" calcext:value-type="float">
            <text:p>1</text:p>
          </table:table-cell>
        </table:table-row>
        <table:table-row table:style-name="ro2">
          <table:table-cell office:value-type="string" calcext:value-type="string">
            <text:p>青</text:p>
          </table:table-cell>
          <table:table-cell office:value-type="float" office:value="2" calcext:value-type="float">
            <text:p>2</text:p>
          </table:table-cell>
        </table:table-row>
        <table:table-row table:style-name="ro2">
          <table:table-cell office:value-type="string" calcext:value-type="string">
            <text:p>緑</text:p>
          </table:table-cell>
          <table:table-cell office:value-type="float" office:value="4" calcext:value-type="float">
            <text:p>4</text:p>
          </table:table-cell>
        </table:table-row>
        <table:table-row table:style-name="ro2">
          <table:table-cell office:value-type="string" calcext:value-type="string">
            <text:p>黄</text:p>
          </table:table-cell>
          <table:table-cell office:value-type="float" office:value="8" calcext:value-type="float">
            <text:p>8</text:p>
          </table:table-cell>
        </table:table-row>
        <table:table-row table:style-name="ro2">
          <table:table-cell office:value-type="string" calcext:value-type="string">
            <text:p>紫</text:p>
          </table:table-cell>
          <table:table-cell office:value-type="float" office:value="16" calcext:value-type="float">
            <text:p>16</text:p>
          </table:table-cell>
        </table:table-row>
        <table:table-row table:style-name="ro2">
          <table:table-cell office:value-type="string" calcext:value-type="string">
            <text:p>多色</text:p>
          </table:table-cell>
          <table:table-cell office:value-type="float" office:value="32" calcext:value-type="float">
            <text:p>32</text:p>
          </table:table-cell>
        </table:table-row>
        <table:table-row table:style-name="ro2">
          <table:table-cell office:value-type="string" calcext:value-type="string">
            <text:p>赤黄</text:p>
          </table:table-cell>
          <table:table-cell office:value-type="float" office:value="41" calcext:value-type="float">
            <text:p>41</text:p>
          </table:table-cell>
        </table:table-row>
        <table:table-row table:style-name="ro2">
          <table:table-cell office:value-type="string" calcext:value-type="string">
            <text:p>青黄</text:p>
          </table:table-cell>
          <table:table-cell office:value-type="float" office:value="42" calcext:value-type="float">
            <text:p>42</text:p>
          </table:table-cell>
        </table:table-row>
        <table:table-row table:style-name="ro2">
          <table:table-cell office:value-type="string" calcext:value-type="string">
            <text:p>緑黄</text:p>
          </table:table-cell>
          <table:table-cell office:value-type="float" office:value="44" calcext:value-type="float">
            <text:p>44</text:p>
          </table:table-cell>
        </table:table-row>
        <table:table-row table:style-name="ro2">
          <table:table-cell office:value-type="string" calcext:value-type="string">
            <text:p>無色</text:p>
          </table:table-cell>
          <table:table-cell office:value-type="float" office:value="64" calcext:value-type="float">
            <text:p>64</text:p>
          </table:table-cell>
        </table:table-row>
      </table:table>
      <table:table table:name="能力語番号" table:style-name="ta1">
        <table:table-column table:style-name="co11" table:default-cell-style-name="Default"/>
        <table:table-column table:style-name="co1" table:default-cell-style-name="Default"/>
        <table:table-row table:style-name="ro2">
          <table:table-cell office:value-type="string" calcext:value-type="string">
            <text:p>航海</text:p>
          </table:table-cell>
          <table:table-cell office:value-type="float" office:value="1" calcext:value-type="float">
            <text:p>1</text:p>
          </table:table-cell>
        </table:table-row>
        <table:table-row table:style-name="ro2">
          <table:table-cell office:value-type="string" calcext:value-type="string">
            <text:p>執筆</text:p>
          </table:table-cell>
          <table:table-cell office:value-type="float" office:value="2" calcext:value-type="float">
            <text:p>2</text:p>
          </table:table-cell>
        </table:table-row>
        <table:table-row table:style-name="ro2">
          <table:table-cell office:value-type="string" calcext:value-type="string">
            <text:p>決起</text:p>
          </table:table-cell>
          <table:table-cell office:value-type="float" office:value="4" calcext:value-type="float">
            <text:p>4</text:p>
          </table:table-cell>
        </table:table-row>
        <table:table-row table:style-name="ro2">
          <table:table-cell office:value-type="string" calcext:value-type="string">
            <text:p>徴募</text:p>
          </table:table-cell>
          <table:table-cell office:value-type="float" office:value="8" calcext:value-type="float">
            <text:p>8</text:p>
          </table:table-cell>
        </table:table-row>
        <table:table-row table:style-name="ro2">
          <table:table-cell office:value-type="string" calcext:value-type="string">
            <text:p>魔導</text:p>
          </table:table-cell>
          <table:table-cell office:value-type="float" office:value="16" calcext:value-type="float">
            <text:p>16</text:p>
          </table:table-cell>
        </table:table-row>
        <table:table-row table:style-name="ro2">
          <table:table-cell office:value-type="string" calcext:value-type="string">
            <text:p>赤魔導</text:p>
          </table:table-cell>
          <table:table-cell table:formula="of:=16+32" office:value-type="float" office:value="48" calcext:value-type="float">
            <text:p>48</text:p>
          </table:table-cell>
        </table:table-row>
        <table:table-row table:style-name="ro2">
          <table:table-cell office:value-type="string" calcext:value-type="string">
            <text:p>青魔導</text:p>
          </table:table-cell>
          <table:table-cell table:formula="of:=16+64" office:value-type="float" office:value="80" calcext:value-type="float">
            <text:p>80</text:p>
          </table:table-cell>
        </table:table-row>
        <table:table-row table:style-name="ro2">
          <table:table-cell office:value-type="string" calcext:value-type="string">
            <text:p>緑魔導</text:p>
          </table:table-cell>
          <table:table-cell table:formula="of:=16+128" office:value-type="float" office:value="144" calcext:value-type="float">
            <text:p>144</text:p>
          </table:table-cell>
        </table:table-row>
        <table:table-row table:style-name="ro2">
          <table:table-cell office:value-type="string" calcext:value-type="string">
            <text:p>黄魔導</text:p>
          </table:table-cell>
          <table:table-cell table:formula="of:=16+256" office:value-type="float" office:value="272" calcext:value-type="float">
            <text:p>272</text:p>
          </table:table-cell>
        </table:table-row>
        <table:table-row table:style-name="ro2">
          <table:table-cell office:value-type="string" calcext:value-type="string">
            <text:p>紫魔導</text:p>
          </table:table-cell>
          <table:table-cell table:formula="of:=16+512" office:value-type="float" office:value="528" calcext:value-type="float">
            <text:p>528</text:p>
          </table:table-cell>
        </table:table-row>
      </table:table>
      <table:table table:name="特性番号" table:style-name="ta1">
        <table:table-column table:style-name="co12" table:default-cell-style-name="Default"/>
        <table:table-column table:style-name="co3" table:default-cell-style-name="Default"/>
        <table:table-row table:style-name="ro2">
          <table:table-cell office:value-type="string" calcext:value-type="string">
            <text:p>剣術</text:p>
          </table:table-cell>
          <table:table-cell office:value-type="float" office:value="1" calcext:value-type="float">
            <text:p>1</text:p>
          </table:table-cell>
        </table:table-row>
        <table:table-row table:style-name="ro2">
          <table:table-cell office:value-type="string" calcext:value-type="string">
            <text:p>美術</text:p>
          </table:table-cell>
          <table:table-cell office:value-type="float" office:value="2" calcext:value-type="float">
            <text:p>2</text:p>
          </table:table-cell>
        </table:table-row>
        <table:table-row table:style-name="ro2">
          <table:table-cell office:value-type="string" calcext:value-type="string">
            <text:p>音楽</text:p>
          </table:table-cell>
          <table:table-cell office:value-type="float" office:value="4" calcext:value-type="float">
            <text:p>4</text:p>
          </table:table-cell>
        </table:table-row>
        <table:table-row table:style-name="ro2">
          <table:table-cell office:value-type="string" calcext:value-type="string">
            <text:p>思想</text:p>
          </table:table-cell>
          <table:table-cell office:value-type="float" office:value="8" calcext:value-type="float">
            <text:p>8</text:p>
          </table:table-cell>
        </table:table-row>
        <table:table-row table:style-name="ro2">
          <table:table-cell office:value-type="string" calcext:value-type="string">
            <text:p>美術 思想</text:p>
          </table:table-cell>
          <table:table-cell office:value-type="float" office:value="10" calcext:value-type="float">
            <text:p>10</text:p>
          </table:table-cell>
        </table:table-row>
        <table:table-row table:style-name="ro2">
          <table:table-cell office:value-type="string" calcext:value-type="string">
            <text:p>医術</text:p>
          </table:table-cell>
          <table:table-cell office:value-type="float" office:value="16" calcext:value-type="float">
            <text:p>16</text:p>
          </table:table-cell>
        </table:table-row>
        <table:table-row table:style-name="ro2">
          <table:table-cell office:value-type="string" calcext:value-type="string">
            <text:p>志願</text:p>
          </table:table-cell>
          <table:table-cell office:value-type="float" office:value="32" calcext:value-type="float">
            <text:p>32</text:p>
          </table:table-cell>
        </table:table-row>
        <table:table-row table:style-name="ro2">
          <table:table-cell office:value-type="string" calcext:value-type="string">
            <text:p>剣術 志願</text:p>
          </table:table-cell>
          <table:table-cell office:value-type="float" office:value="33" calcext:value-type="float">
            <text:p>33</text:p>
          </table:table-cell>
        </table:table-row>
      </table:table>
      <table:table table:name="遺業能力番号" table:style-name="ta1">
        <table:table-column table:style-name="co17" table:default-cell-style-name="Default"/>
        <table:table-column table:style-name="co16" table:default-cell-style-name="Default"/>
        <table:table-row table:style-name="ro2">
          <table:table-cell office:value-type="string" calcext:value-type="string">
            <text:p>魔力化</text:p>
          </table:table-cell>
          <table:table-cell office:value-type="float" office:value="1" calcext:value-type="float">
            <text:p>1</text:p>
          </table:table-cell>
        </table:table-row>
        <table:table-row table:style-name="ro2">
          <table:table-cell office:value-type="string" calcext:value-type="string">
            <text:p>冥府発動</text:p>
          </table:table-cell>
          <table:table-cell office:value-type="float" office:value="2" calcext:value-type="float">
            <text:p>2</text:p>
          </table:table-cell>
        </table:table-row>
        <table:table-row table:style-name="ro2">
          <table:table-cell office:value-type="string" calcext:value-type="string">
            <text:p>復元</text:p>
          </table:table-cell>
          <table:table-cell office:value-type="float" office:value="3" calcext:value-type="float">
            <text:p>3</text:p>
          </table:table-cell>
        </table:table-row>
        <table:table-row table:style-name="ro2">
          <table:table-cell office:value-type="string" calcext:value-type="string">
            <text:p>1ドローする</text:p>
          </table:table-cell>
          <table:table-cell office:value-type="float" office:value="4" calcext:value-type="float">
            <text:p>4</text:p>
          </table:table-cell>
        </table:table-row>
        <table:table-row table:style-name="ro2">
          <table:table-cell office:value-type="string" calcext:value-type="string">
            <text:p>手札に戻す</text:p>
          </table:table-cell>
          <table:table-cell office:value-type="float" office:value="5" calcext:value-type="float">
            <text:p>5</text:p>
          </table:table-cell>
        </table:table-row>
        <table:table-row table:style-name="ro2">
          <table:table-cell office:value-type="string" calcext:value-type="string">
            <text:p>反魂</text:p>
          </table:table-cell>
          <table:table-cell office:value-type="float" office:value="6" calcext:value-type="float">
            <text:p>6</text:p>
          </table:table-cell>
        </table:table-row>
        <table:table-row table:style-name="ro2">
          <table:table-cell office:value-type="string" calcext:value-type="string">
            <text:p>山札の上か下に戻す</text:p>
          </table:table-cell>
          <table:table-cell office:value-type="float" office:value="7" calcext:value-type="float">
            <text:p>7</text:p>
          </table:table-cell>
        </table:table-row>
        <table:table-row table:style-name="ro2">
          <table:table-cell office:value-type="string" calcext:value-type="string">
            <text:p>木霊</text:p>
          </table:table-cell>
          <table:table-cell office:value-type="float" office:value="8" calcext:value-type="float">
            <text:p>8</text:p>
          </table:table-cell>
        </table:table-row>
        <table:table-row table:style-name="ro2">
          <table:table-cell office:value-type="string" calcext:value-type="string">
            <text:p>喪神</text:p>
          </table:table-cell>
          <table:table-cell office:value-type="float" office:value="9" calcext:value-type="float">
            <text:p>9</text:p>
          </table:table-cell>
        </table:table-row>
      </table:table>
      <table:table table:name="JSON" table:style-name="ta1">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11"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row table:style-name="ro2">
          <table:table-cell office:value-type="string" calcext:value-type="string">
            <text:p>{"id":"</text:p>
          </table:table-cell>
          <table:table-cell office:value-type="string" calcext:value-type="string">
            <text:p>","name":"</text:p>
          </table:table-cell>
          <table:table-cell office:value-type="string" calcext:value-type="string">
            <text:p>","kana":"</text:p>
          </table:table-cell>
          <table:table-cell office:value-type="string" calcext:value-type="string">
            <text:p>","traitText":</text:p>
          </table:table-cell>
          <table:table-cell office:value-type="string" calcext:value-type="string">
            <text:p>,"ruleText":"</text:p>
          </table:table-cell>
          <table:table-cell office:value-type="string" calcext:value-type="string">
            <text:p>","legacyText":</text:p>
          </table:table-cell>
          <table:table-cell office:value-type="string" calcext:value-type="string">
            <text:p>,"imageUrl":"</text:p>
          </table:table-cell>
          <table:table-cell office:value-type="string" calcext:value-type="string">
            <text:p>","expansion":</text:p>
          </table:table-cell>
          <table:table-cell office:value-type="string" calcext:value-type="string">
            <text:p>,"rarity":</text:p>
          </table:table-cell>
          <table:table-cell office:value-type="string" calcext:value-type="string">
            <text:p>,"type":</text:p>
          </table:table-cell>
          <table:table-cell office:value-type="string" calcext:value-type="string">
            <text:p>,"level":</text:p>
          </table:table-cell>
          <table:table-cell office:value-type="string" calcext:value-type="string">
            <text:p>,"color":</text:p>
          </table:table-cell>
          <table:table-cell office:value-type="string" calcext:value-type="string">
            <text:p>,"term":</text:p>
          </table:table-cell>
          <table:table-cell office:value-type="string" calcext:value-type="string">
            <text:p><text:span text:style-name="T1">,"trait"</text:span>:</text:p>
          </table:table-cell>
          <table:table-cell office:value-type="string" calcext:value-type="string">
            <text:p><text:span text:style-name="T1">,"legacy"</text:span>:</text:p>
          </table:table-cell>
          <table:table-cell office:value-type="string" calcext:value-type="string">
            <text:p>,"orderTable":</text:p>
          </table:table-cell>
          <table:table-cell office:value-type="string" calcext:value-type="string">
            <text:p>,"orderDeck":</text:p>
          </table:table-cell>
          <table:table-cell office:value-type="string" calcext:value-type="string">
            <text:p>},</text:p>
          </table:table-cell>
        </table:table-row>
      </table:table>
      <table:table table:name="注意" table:style-name="ta1">
        <table:table-column table:style-name="co15" table:default-cell-style-name="Default"/>
        <table:table-row table:style-name="ro3">
          <table:table-cell office:value-type="string" calcext:value-type="string">
            <text:p>テーブル順309番とデッキ順201番は土方歳三PSRに予約</text:p>
          </table:table-cell>
        </table:table-row>
        <table:table-row table:style-name="ro3">
          <table:table-cell office:value-type="string" calcext:value-type="string">
            <text:p>テーブル順390番とデッキ順236番はカール大帝PSRに予約</text:p>
          </table:table-cell>
        </table:table-row>
      </table:table>
      <table:named-expressions/>
      <table:database-ranges>
        <table:database-range table:name="__Anonymous_Sheet_DB__0" table:target-range-address="Sheet1.A1:Sheet1.Y389">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Noto Sans JP" svg:font-family="'Noto Sans JP'" style:font-family-generic="system" style:font-pitch="variable"/>
    <style:font-face style:name="游ゴシック" svg:font-family="游ゴシック"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游ゴシック" style:font-size-asian="10pt" style:language-asian="ja" style:country-asian="JP"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06">0000/00/00</text:date>, <text:time style:data-style-name="N2" text:time-value="09:33:01.914000000">00:00:00</text:time></text:p>
        </style:region-right>
      </style:header>
      <style:header-left style:display="false"/>
      <style:header-first style:display="false"/>
      <style:footer>
        <text:p>ページ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1T08:31:42.845000000</meta:creation-date>
    <dc:date>2025-05-06T09:33:24.514000000</dc:date>
    <meta:editing-duration>PT17H34M25S</meta:editing-duration>
    <meta:editing-cycles>456</meta:editing-cycles>
    <meta:generator>LibreOffice/7.5.3.2$Windows_X86_64 LibreOffice_project/9f56dff12ba03b9acd7730a5a481eea045e468f3</meta:generator>
    <meta:document-statistic meta:table-count="10" meta:cell-count="9843" meta:object-count="0"/>
  </office:meta>
</office:document-meta>
</file>